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1800000018004236217.png" manifest:media-type="image/png"/>
  <manifest:file-entry manifest:full-path="Pictures/1000000100000180000001801CB98219.png" manifest:media-type="image/png"/>
  <manifest:file-entry manifest:full-path="Pictures/1000000100000180000001808C9C3419.png" manifest:media-type="image/png"/>
  <manifest:file-entry manifest:full-path="Pictures/10000001000001EC000001E85763B480.png" manifest:media-type="image/png"/>
  <manifest:file-entry manifest:full-path="Pictures/100000010000054B0000037B1AB69FB0.png" manifest:media-type="image/png"/>
  <manifest:file-entry manifest:full-path="Pictures/1000000100000180000001802E33A39B.png" manifest:media-type="image/png"/>
  <manifest:file-entry manifest:full-path="Pictures/10000000000001020000016F048A877F.png" manifest:media-type="image/png"/>
  <manifest:file-entry manifest:full-path="Pictures/10000000000000D00000014038551B79.png" manifest:media-type="image/png"/>
  <manifest:file-entry manifest:full-path="Pictures/10000001000001440000014181E4885D.png" manifest:media-type="image/png"/>
  <manifest:file-entry manifest:full-path="Pictures/100000000000015A0000015C6F75C6E7.jpg" manifest:media-type="image/jpeg"/>
  <manifest:file-entry manifest:full-path="Pictures/10000001000001B800000323F8829B62.png" manifest:media-type="image/png"/>
  <manifest:file-entry manifest:full-path="Pictures/100000000000012B0000012BBDAD5880.jpg" manifest:media-type="image/jpeg"/>
  <manifest:file-entry manifest:full-path="Pictures/1000000100000370000004367B4B8D70.png" manifest:media-type="image/png"/>
  <manifest:file-entry manifest:full-path="Pictures/10000001000004950000041389E61CD2.png" manifest:media-type="image/png"/>
  <manifest:file-entry manifest:full-path="Pictures/10000001000001800000018008118492.png" manifest:media-type="image/png"/>
  <manifest:file-entry manifest:full-path="Pictures/100000010000036300000262132C89DD.png" manifest:media-type="image/png"/>
  <manifest:file-entry manifest:full-path="Pictures/100000010000018000000180C7A7B6C0.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BoldMT" svg:font-family="Arial-BoldMT" style:font-family-generic="system" style:font-pitch="variable"/>
    <style:font-face style:name="Arial-ItalicMT" svg:font-family="Arial-ItalicMT" style:font-family-generic="system" style:font-pitch="variable"/>
    <style:font-face style:name="Arial1" svg:font-family="Arial" style:font-family-generic="system" style:font-pitch="variable"/>
    <style:font-face style:name="ArialMT" svg:font-family="ArialMT"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arlito" svg:font-family="Carlito" style:font-family-generic="roman"/>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egoe UI" svg:font-family="'Segoe UI'" style:font-family-generic="roman"/>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a1" style:family="table">
      <style:table-properties style:width="16.745cm" fo:margin-left="0cm" fo:margin-top="0cm" fo:margin-bottom="0cm" table:align="left" style:writing-mode="lr-tb"/>
    </style:style>
    <style:style style:name="Tabla1.A" style:family="table-column">
      <style:table-column-properties style:column-width="8.491cm"/>
    </style:style>
    <style:style style:name="Tabla1.B" style:family="table-column">
      <style:table-column-properties style:column-width="8.251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2" style:family="table-row">
      <style:table-row-properties style:min-row-height="2.73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 style:family="table">
      <style:table-properties style:width="13.252cm" fo:margin-left="2.596cm" fo:margin-top="0cm" fo:margin-bottom="0cm" table:align="left" style:writing-mode="lr-tb"/>
    </style:style>
    <style:style style:name="Tabla2.A" style:family="table-column">
      <style:table-column-properties style:column-width="6.805cm"/>
    </style:style>
    <style:style style:name="Tabla2.B" style:family="table-column">
      <style:table-column-properties style:column-width="6.445cm"/>
    </style:style>
    <style:style style:name="Tabla2.1" style:family="table-row">
      <style:table-row-properties style:min-row-height="0.601cm" fo:keep-together="auto"/>
    </style:style>
    <style:style style:name="Tab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2" style:family="table-row">
      <style:table-row-properties style:min-row-height="0.573cm" fo:keep-together="auto"/>
    </style:style>
    <style:style style:name="Tabla2.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 style:family="table">
      <style:table-properties style:width="12.501cm" fo:margin-left="2.501cm" fo:margin-top="0cm" fo:margin-bottom="0cm" table:align="left" style:writing-mode="lr-tb"/>
    </style:style>
    <style:style style:name="Tabla3.A" style:family="table-column">
      <style:table-column-properties style:column-width="8.611cm"/>
    </style:style>
    <style:style style:name="Tabla3.B" style:family="table-column">
      <style:table-column-properties style:column-width="3.888cm"/>
    </style:style>
    <style:style style:name="Tabla3.1" style:family="table-row">
      <style:table-row-properties style:min-row-height="1.455cm" fo:keep-together="auto"/>
    </style:style>
    <style:style style:name="Tabla3.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3.2" style:family="table-row">
      <style:table-row-properties style:min-row-height="0.573cm" fo:keep-together="auto"/>
    </style:style>
    <style:style style:name="Tabla3.A2" style:family="table-cell">
      <style:table-cell-properties style:vertical-align="middle" fo:padding-left="0.191cm" fo:padding-right="0.191cm" fo:padding-top="0cm" fo:padding-bottom="0cm" fo:border="none" style:writing-mode="lr-tb"/>
    </style:style>
    <style:style style:name="Tabla3.3" style:family="table-row">
      <style:table-row-properties style:min-row-height="1.117cm" fo:keep-together="auto"/>
    </style:style>
    <style:style style:name="Tabla3.4" style:family="table-row">
      <style:table-row-properties style:min-row-height="0.132cm" fo:keep-together="auto"/>
    </style:style>
    <style:style style:name="Tabla3.A4"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 style:family="table">
      <style:table-properties style:width="12.106cm" fo:margin-left="2.397cm" fo:margin-top="0cm" fo:margin-bottom="0cm" table:align="left" style:writing-mode="lr-tb"/>
    </style:style>
    <style:style style:name="Tabla4.A" style:family="table-column">
      <style:table-column-properties style:column-width="2.103cm"/>
    </style:style>
    <style:style style:name="Tabla4.B" style:family="table-column">
      <style:table-column-properties style:column-width="3.5cm"/>
    </style:style>
    <style:style style:name="Tabla4.C" style:family="table-column">
      <style:table-column-properties style:column-width="3.253cm"/>
    </style:style>
    <style:style style:name="Tabla4.D" style:family="table-column">
      <style:table-column-properties style:column-width="3.249cm"/>
    </style:style>
    <style:style style:name="Tabla4.1" style:family="table-row">
      <style:table-row-properties style:min-row-height="0.466cm" fo:keep-together="auto"/>
    </style:style>
    <style:style style:name="Tabla4.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4.A2" style:family="table-cell">
      <style:table-cell-properties style:vertical-align="middle" fo:padding-left="0.191cm" fo:padding-right="0.191cm" fo:padding-top="0cm" fo:padding-bottom="0cm" fo:border="none" style:writing-mode="lr-tb"/>
    </style:style>
    <style:style style:name="Tabla4.A5"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5" style:family="table">
      <style:table-properties style:width="6.996cm" fo:margin-left="2.506cm" fo:margin-top="0cm" fo:margin-bottom="0cm" table:align="left" style:writing-mode="lr-tb"/>
    </style:style>
    <style:style style:name="Tabla5.A" style:family="table-column">
      <style:table-column-properties style:column-width="2.743cm"/>
    </style:style>
    <style:style style:name="Tabla5.B" style:family="table-column">
      <style:table-column-properties style:column-width="2.002cm"/>
    </style:style>
    <style:style style:name="Tabla5.C" style:family="table-column">
      <style:table-column-properties style:column-width="2.251cm"/>
    </style:style>
    <style:style style:name="Tabla5.1" style:family="table-row">
      <style:table-row-properties style:min-row-height="0.49cm" fo:keep-together="auto"/>
    </style:style>
    <style:style style:name="Tabla5.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A2" style:family="table-cell">
      <style:table-cell-properties style:vertical-align="middle" fo:padding-left="0.191cm" fo:padding-right="0.191cm" fo:padding-top="0cm" fo:padding-bottom="0cm" fo:border="none" style:writing-mode="lr-tb"/>
    </style:style>
    <style:style style:name="Tabla5.A8"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6" style:family="table">
      <style:table-properties style:width="14.288cm" fo:margin-left="2.575cm" fo:margin-top="0cm" fo:margin-bottom="0cm" table:align="left" style:writing-mode="lr-tb"/>
    </style:style>
    <style:style style:name="Tabla6.A" style:family="table-column">
      <style:table-column-properties style:column-width="3.722cm"/>
    </style:style>
    <style:style style:name="Tabla6.B" style:family="table-column">
      <style:table-column-properties style:column-width="3.955cm"/>
    </style:style>
    <style:style style:name="Tabla6.C" style:family="table-column">
      <style:table-column-properties style:column-width="3cm"/>
    </style:style>
    <style:style style:name="Tabla6.D" style:family="table-column">
      <style:table-column-properties style:column-width="3.609cm"/>
    </style:style>
    <style:style style:name="Tabla6.1" style:family="table-row">
      <style:table-row-properties style:min-row-height="0.953cm" fo:keep-together="auto"/>
    </style:style>
    <style:style style:name="Tabla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6.2" style:family="table-row">
      <style:table-row-properties style:min-row-height="0.487cm" fo:keep-together="auto"/>
    </style:style>
    <style:style style:name="Tabla6.A2" style:family="table-cell">
      <style:table-cell-properties style:vertical-align="middle" fo:padding-left="0.191cm" fo:padding-right="0.191cm" fo:padding-top="0cm" fo:padding-bottom="0cm" fo:border="none" style:writing-mode="lr-tb"/>
    </style:style>
    <style:style style:name="Tabla6.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7" style:family="table">
      <style:table-properties style:width="14.288cm" fo:margin-left="2.506cm" fo:margin-top="0cm" fo:margin-bottom="0cm" table:align="left" style:writing-mode="lr-tb"/>
    </style:style>
    <style:style style:name="Tabla7.A" style:family="table-column">
      <style:table-column-properties style:column-width="4.082cm"/>
    </style:style>
    <style:style style:name="Tabla7.B" style:family="table-column">
      <style:table-column-properties style:column-width="3.912cm"/>
    </style:style>
    <style:style style:name="Tabla7.C" style:family="table-column">
      <style:table-column-properties style:column-width="0.45cm"/>
    </style:style>
    <style:style style:name="Tabla7.D" style:family="table-column">
      <style:table-column-properties style:column-width="2.302cm"/>
    </style:style>
    <style:style style:name="Tabla7.E" style:family="table-column">
      <style:table-column-properties style:column-width="0.727cm"/>
    </style:style>
    <style:style style:name="Tabla7.F" style:family="table-column">
      <style:table-column-properties style:column-width="2.813cm"/>
    </style:style>
    <style:style style:name="Tabla7.1" style:family="table-row">
      <style:table-row-properties style:min-row-height="1.037cm" fo:keep-together="auto"/>
    </style:style>
    <style:style style:name="Tabla7.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7.2" style:family="table-row">
      <style:table-row-properties style:min-row-height="0.529cm" fo:keep-together="auto"/>
    </style:style>
    <style:style style:name="Tabla7.A2" style:family="table-cell">
      <style:table-cell-properties style:vertical-align="middle" fo:padding-left="0.191cm" fo:padding-right="0.191cm" fo:padding-top="0cm" fo:padding-bottom="0cm" fo:border="none" style:writing-mode="lr-tb"/>
    </style:style>
    <style:style style:name="Tabla7.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8" style:family="table">
      <style:table-properties style:width="13.66cm" fo:margin-left="2.505cm" fo:margin-top="0cm" fo:margin-bottom="0cm" table:align="left" style:writing-mode="lr-tb"/>
    </style:style>
    <style:style style:name="Tabla8.A" style:family="table-column">
      <style:table-column-properties style:column-width="1.845cm"/>
    </style:style>
    <style:style style:name="Tabla8.B" style:family="table-column">
      <style:table-column-properties style:column-width="2.402cm"/>
    </style:style>
    <style:style style:name="Tabla8.C" style:family="table-column">
      <style:table-column-properties style:column-width="3.018cm"/>
    </style:style>
    <style:style style:name="Tabla8.D" style:family="table-column">
      <style:table-column-properties style:column-width="2.096cm"/>
    </style:style>
    <style:style style:name="Tabla8.E" style:family="table-column">
      <style:table-column-properties style:column-width="1.374cm"/>
    </style:style>
    <style:style style:name="Tabla8.F" style:family="table-column">
      <style:table-column-properties style:column-width="2.923cm"/>
    </style:style>
    <style:style style:name="Tabla8.1" style:family="table-row">
      <style:table-row-properties style:min-row-height="1.376cm" fo:keep-together="auto"/>
    </style:style>
    <style:style style:name="Tabla8.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8.2" style:family="table-row">
      <style:table-row-properties style:min-row-height="0.529cm" fo:keep-together="auto"/>
    </style:style>
    <style:style style:name="Tabla8.A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8.A3" style:family="table-cell">
      <style:table-cell-properties style:vertical-align="middle" fo:padding-left="0.191cm" fo:padding-right="0.191cm" fo:padding-top="0cm" fo:padding-bottom="0cm" fo:border="none" style:writing-mode="lr-tb"/>
    </style:style>
    <style:style style:name="Tabla8.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9" style:family="table">
      <style:table-properties style:width="15cm" fo:margin-left="2.462cm" fo:margin-top="0cm" fo:margin-bottom="0cm" table:align="left" style:writing-mode="lr-tb"/>
    </style:style>
    <style:style style:name="Tabla9.A" style:family="table-column">
      <style:table-column-properties style:column-width="2.318cm"/>
    </style:style>
    <style:style style:name="Tabla9.B" style:family="table-column">
      <style:table-column-properties style:column-width="5.11cm"/>
    </style:style>
    <style:style style:name="Tabla9.C" style:family="table-column">
      <style:table-column-properties style:column-width="4.226cm"/>
    </style:style>
    <style:style style:name="Tabla9.D" style:family="table-column">
      <style:table-column-properties style:column-width="3.344cm"/>
    </style:style>
    <style:style style:name="Tabla9.1" style:family="table-row">
      <style:table-row-properties style:min-row-height="0.953cm" fo:keep-together="auto"/>
    </style:style>
    <style:style style:name="Tabla9.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9.2" style:family="table-row">
      <style:table-row-properties style:min-row-height="0.487cm" fo:keep-together="auto"/>
    </style:style>
    <style:style style:name="Tabla9.A2" style:family="table-cell">
      <style:table-cell-properties style:vertical-align="middle" fo:padding-left="0.191cm" fo:padding-right="0.191cm" fo:padding-top="0cm" fo:padding-bottom="0cm" fo:border="none" style:writing-mode="lr-tb"/>
    </style:style>
    <style:style style:name="Tabla9.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6" style:family="table">
      <style:table-properties style:width="10.684cm" fo:margin-left="2.173cm" fo:margin-top="0cm" fo:margin-bottom="0cm" table:align="left" style:writing-mode="lr-tb"/>
    </style:style>
    <style:style style:name="Tabla16.A" style:family="table-column">
      <style:table-column-properties style:column-width="4.72cm"/>
    </style:style>
    <style:style style:name="Tabla16.B" style:family="table-column">
      <style:table-column-properties style:column-width="3.11cm"/>
    </style:style>
    <style:style style:name="Tabla16.C" style:family="table-column">
      <style:table-column-properties style:column-width="2.854cm"/>
    </style:style>
    <style:style style:name="Tabla16.1" style:family="table-row">
      <style:table-row-properties fo:keep-together="auto"/>
    </style:style>
    <style:style style:name="Tabla1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6.A2" style:family="table-cell">
      <style:table-cell-properties style:vertical-align="middle" fo:padding-left="0.191cm" fo:padding-right="0.191cm" fo:padding-top="0cm" fo:padding-bottom="0cm" fo:border="none" style:writing-mode="lr-tb"/>
    </style:style>
    <style:style style:name="Tabla16.A4"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3" style:family="table">
      <style:table-properties style:width="14.651cm" fo:margin-left="2.415cm" fo:margin-top="0cm" fo:margin-bottom="0cm" table:align="left" style:writing-mode="lr-tb"/>
    </style:style>
    <style:style style:name="Tabla23.A" style:family="table-column">
      <style:table-column-properties style:column-width="3.424cm"/>
    </style:style>
    <style:style style:name="Tabla23.B" style:family="table-column">
      <style:table-column-properties style:column-width="3.336cm"/>
    </style:style>
    <style:style style:name="Tabla23.C" style:family="table-column">
      <style:table-column-properties style:column-width="2.822cm"/>
    </style:style>
    <style:style style:name="Tabla23.D" style:family="table-column">
      <style:table-column-properties style:column-width="1.644cm"/>
    </style:style>
    <style:style style:name="Tabla23.E" style:family="table-column">
      <style:table-column-properties style:column-width="2.111cm"/>
    </style:style>
    <style:style style:name="Tabla23.F" style:family="table-column">
      <style:table-column-properties style:column-width="1.312cm"/>
    </style:style>
    <style:style style:name="Tabla23.1" style:family="table-row">
      <style:table-row-properties style:min-row-height="1.323cm" fo:keep-together="auto"/>
    </style:style>
    <style:style style:name="Tabla2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3.2" style:family="table-row">
      <style:table-row-properties style:min-row-height="0.529cm" fo:keep-together="auto"/>
    </style:style>
    <style:style style:name="Tabla23.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4" style:family="table">
      <style:table-properties style:rel-width="100%" fo:margin-left="0cm" fo:margin-top="0cm" fo:margin-bottom="0cm" table:align="left" style:writing-mode="lr-tb"/>
    </style:style>
    <style:style style:name="Tabla24.A" style:family="table-column">
      <style:table-column-properties style:rel-column-width="18212*"/>
    </style:style>
    <style:style style:name="Tabla24.B" style:family="table-column">
      <style:table-column-properties style:rel-column-width="16370*"/>
    </style:style>
    <style:style style:name="Tabla24.C" style:family="table-column">
      <style:table-column-properties style:rel-column-width="16817*"/>
    </style:style>
    <style:style style:name="Tabla24.D" style:family="table-column">
      <style:table-column-properties style:rel-column-width="14133*"/>
    </style:style>
    <style:style style:name="Tabla24.1" style:family="table-row">
      <style:table-row-properties style:min-row-height="0.995cm" fo:keep-together="auto"/>
    </style:style>
    <style:style style:name="Tabla24.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24.2" style:family="table-row">
      <style:table-row-properties style:min-row-height="1.461cm" fo:keep-together="auto"/>
    </style:style>
    <style:style style:name="Tabla24.A2" style:family="table-cell">
      <style:table-cell-properties style:vertical-align="middle" fo:padding-left="0.191cm" fo:padding-right="0.191cm" fo:padding-top="0cm" fo:padding-bottom="0cm" fo:border="none" style:writing-mode="lr-tb"/>
    </style:style>
    <style:style style:name="Tabla24.B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4.3" style:family="table-row">
      <style:table-row-properties style:min-row-height="0.508cm" fo:keep-together="auto"/>
    </style:style>
    <style:style style:name="Tabla25" style:family="table">
      <style:table-properties style:width="14.661cm" fo:margin-left="2.482cm" fo:margin-top="0cm" fo:margin-bottom="0cm" table:align="left" style:writing-mode="lr-tb"/>
    </style:style>
    <style:style style:name="Tabla25.A" style:family="table-column">
      <style:table-column-properties style:column-width="4.791cm"/>
    </style:style>
    <style:style style:name="Tabla25.B" style:family="table-column">
      <style:table-column-properties style:column-width="3.05cm"/>
    </style:style>
    <style:style style:name="Tabla25.C" style:family="table-column">
      <style:table-column-properties style:column-width="3.574cm"/>
    </style:style>
    <style:style style:name="Tabla25.D" style:family="table-column">
      <style:table-column-properties style:column-width="3.246cm"/>
    </style:style>
    <style:style style:name="Tabla25.1" style:family="table-row">
      <style:table-row-properties style:min-row-height="0.561cm" fo:keep-together="auto"/>
    </style:style>
    <style:style style:name="Tabla25.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5.2" style:family="table-row">
      <style:table-row-properties style:min-row-height="0.572cm" fo:keep-together="auto"/>
    </style:style>
    <style:style style:name="Tabla25.A2" style:family="table-cell">
      <style:table-cell-properties style:vertical-align="middle" fo:padding-left="0.191cm" fo:padding-right="0.191cm" fo:padding-top="0cm" fo:padding-bottom="0cm" fo:border="none" style:writing-mode="lr-tb"/>
    </style:style>
    <style:style style:name="Tabla25.3" style:family="table-row">
      <style:table-row-properties style:min-row-height="0.72cm" fo:keep-together="auto"/>
    </style:style>
    <style:style style:name="Tabla25.4" style:family="table-row">
      <style:table-row-properties style:min-row-height="0.732cm" fo:keep-together="auto"/>
    </style:style>
    <style:style style:name="Tabla25.5" style:family="table-row">
      <style:table-row-properties style:min-row-height="0.12cm" fo:keep-together="auto"/>
    </style:style>
    <style:style style:name="Tabla25.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6" style:family="table">
      <style:table-properties style:width="9.684cm" fo:margin-left="2.505cm" fo:margin-top="0cm" fo:margin-bottom="0cm" table:align="left" style:writing-mode="lr-tb"/>
    </style:style>
    <style:style style:name="Tabla26.A" style:family="table-column">
      <style:table-column-properties style:column-width="4.824cm"/>
    </style:style>
    <style:style style:name="Tabla26.B" style:family="table-column">
      <style:table-column-properties style:column-width="0.39cm"/>
    </style:style>
    <style:style style:name="Tabla26.C" style:family="table-column">
      <style:table-column-properties style:column-width="4.47cm"/>
    </style:style>
    <style:style style:name="Tabla26.1" style:family="table-row">
      <style:table-row-properties fo:keep-together="auto"/>
    </style:style>
    <style:style style:name="Tabla2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6.A2" style:family="table-cell">
      <style:table-cell-properties style:vertical-align="middle" fo:padding-left="0.191cm" fo:padding-right="0.191cm" fo:padding-top="0cm" fo:padding-bottom="0cm" fo:border="none" style:writing-mode="lr-tb"/>
    </style:style>
    <style:style style:name="Tabla26.A4"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7" style:family="table">
      <style:table-properties style:width="18.856cm" fo:margin-left="-2.739cm" fo:margin-top="0cm" fo:margin-bottom="0cm" table:align="left" style:writing-mode="page"/>
    </style:style>
    <style:style style:name="Tabla27.A" style:family="table-column">
      <style:table-column-properties style:column-width="6.174cm"/>
    </style:style>
    <style:style style:name="Tabla27.B" style:family="table-column">
      <style:table-column-properties style:column-width="3.403cm"/>
    </style:style>
    <style:style style:name="Tabla27.C" style:family="table-column">
      <style:table-column-properties style:column-width="9.278cm"/>
    </style:style>
    <style:style style:name="Tabla27.1" style:family="table-row">
      <style:table-row-properties style:min-row-height="0.309cm" fo:keep-together="auto"/>
    </style:style>
    <style:style style:name="Tabla27.A1" style:family="table-cell">
      <style:table-cell-properties fo:background-color="#aeaaaa" fo:padding-left="0.191cm" fo:padding-right="0.191cm" fo:padding-top="0cm" fo:padding-bottom="0cm" fo:border="0.5pt solid #000000">
        <style:background-image/>
      </style:table-cell-properties>
    </style:style>
    <style:style style:name="Tabla27.B1" style:family="table-cell">
      <style:table-cell-properties fo:padding-left="0.191cm" fo:padding-right="0.191cm" fo:padding-top="0cm" fo:padding-bottom="0cm" fo:border="0.5pt solid #000000"/>
    </style:style>
    <style:style style:name="Tabla27.2" style:family="table-row">
      <style:table-row-properties style:min-row-height="0.319cm" fo:keep-together="auto"/>
    </style:style>
    <style:style style:name="Tabla27.B2" style:family="table-cell">
      <style:table-cell-properties fo:padding-left="0.191cm" fo:padding-right="0.191cm" fo:padding-top="0cm" fo:padding-bottom="0cm" fo:border="0.5pt solid #000000"/>
    </style:style>
    <style:style style:name="Tabla27.B3" style:family="table-cell">
      <style:table-cell-properties fo:padding-left="0.191cm" fo:padding-right="0.191cm" fo:padding-top="0cm" fo:padding-bottom="0cm" fo:border="0.5pt solid #000000"/>
    </style:style>
    <style:style style:name="Tabla27.B4" style:family="table-cell">
      <style:table-cell-properties fo:padding-left="0.191cm" fo:padding-right="0.191cm" fo:padding-top="0cm" fo:padding-bottom="0cm" fo:border="0.5pt solid #000000"/>
    </style:style>
    <style:style style:name="Tabla27.5" style:family="table-row">
      <style:table-row-properties style:min-row-height="0.24cm" fo:keep-together="auto"/>
    </style:style>
    <style:style style:name="Tabla27.6" style:family="table-row">
      <style:table-row-properties style:min-row-height="0.166cm" fo:keep-together="auto"/>
    </style:style>
    <style:style style:name="Tabla27.A6" style:family="table-cell">
      <style:table-cell-properties fo:padding-left="0.191cm" fo:padding-right="0.191cm" fo:padding-top="0cm" fo:padding-bottom="0cm" fo:border="0.5pt solid #000000"/>
    </style:style>
    <style:style style:name="Tabla27.C6" style:family="table-cell">
      <style:table-cell-properties fo:padding-left="0.191cm" fo:padding-right="0.191cm" fo:padding-top="0cm" fo:padding-bottom="0cm" fo:border="0.5pt solid #000000"/>
    </style:style>
    <style:style style:name="Tabla27.8" style:family="table-row">
      <style:table-row-properties style:min-row-height="0.951cm" fo:keep-together="auto"/>
    </style:style>
    <style:style style:name="Tabla27.A8" style:family="table-cell">
      <style:table-cell-properties fo:padding-left="0.191cm" fo:padding-right="0.191cm" fo:padding-top="0cm" fo:padding-bottom="0cm" fo:border="0.5pt solid #000000"/>
    </style:style>
    <style:style style:name="Tabla28" style:family="table">
      <style:table-properties style:width="15.229cm" fo:margin-left="0.009cm" fo:margin-top="0cm" fo:margin-bottom="0cm" table:align="left" style:writing-mode="page"/>
    </style:style>
    <style:style style:name="Tabla28.A" style:family="table-column">
      <style:table-column-properties style:column-width="4.232cm"/>
    </style:style>
    <style:style style:name="Tabla28.B" style:family="table-column">
      <style:table-column-properties style:column-width="3.681cm"/>
    </style:style>
    <style:style style:name="Tabla28.C" style:family="table-column">
      <style:table-column-properties style:column-width="7.315cm"/>
    </style:style>
    <style:style style:name="Tabla28.1" style:family="table-row">
      <style:table-row-properties style:min-row-height="0.497cm" fo:keep-together="auto"/>
    </style:style>
    <style:style style:name="Tabla28.A1" style:family="table-cell">
      <style:table-cell-properties fo:background-color="#aeaaaa" fo:padding-left="0.191cm" fo:padding-right="0.191cm" fo:padding-top="0cm" fo:padding-bottom="0cm" fo:border="0.5pt solid #000000">
        <style:background-image/>
      </style:table-cell-properties>
    </style:style>
    <style:style style:name="Tabla28.B1" style:family="table-cell">
      <style:table-cell-properties fo:padding-left="0.191cm" fo:padding-right="0.191cm" fo:padding-top="0cm" fo:padding-bottom="0cm" fo:border="0.5pt solid #000000"/>
    </style:style>
    <style:style style:name="Tabla28.2" style:family="table-row">
      <style:table-row-properties style:min-row-height="0.512cm" fo:keep-together="auto"/>
    </style:style>
    <style:style style:name="Tabla28.B2" style:family="table-cell">
      <style:table-cell-properties fo:padding-left="0.191cm" fo:padding-right="0.191cm" fo:padding-top="0cm" fo:padding-bottom="0cm" fo:border="0.5pt solid #000000"/>
    </style:style>
    <style:style style:name="Tabla28.B3" style:family="table-cell">
      <style:table-cell-properties fo:padding-left="0.191cm" fo:padding-right="0.191cm" fo:padding-top="0cm" fo:padding-bottom="0cm" fo:border="0.5pt solid #000000"/>
    </style:style>
    <style:style style:name="Tabla28.4" style:family="table-row">
      <style:table-row-properties style:min-row-height="0.388cm" fo:keep-together="auto"/>
    </style:style>
    <style:style style:name="Tabla28.5" style:family="table-row">
      <style:table-row-properties style:min-row-height="1.233cm" fo:keep-together="auto"/>
    </style:style>
    <style:style style:name="Tabla28.A5" style:family="table-cell">
      <style:table-cell-properties fo:padding-left="0.191cm" fo:padding-right="0.191cm" fo:padding-top="0cm" fo:padding-bottom="0cm" fo:border="0.5pt solid #000000"/>
    </style:style>
    <style:style style:name="Tabla28.C5" style:family="table-cell">
      <style:table-cell-properties fo:padding-left="0.191cm" fo:padding-right="0.191cm" fo:padding-top="0cm" fo:padding-bottom="0cm" fo:border="0.5pt solid #000000"/>
    </style:style>
    <style:style style:name="Tabla28.7" style:family="table-row">
      <style:table-row-properties style:min-row-height="0.753cm" fo:keep-together="auto"/>
    </style:style>
    <style:style style:name="Tabla28.A7" style:family="table-cell">
      <style:table-cell-properties fo:padding-left="0.191cm" fo:padding-right="0.191cm" fo:padding-top="0cm" fo:padding-bottom="0cm" fo:border="0.5pt solid #000000"/>
    </style:style>
    <style:style style:name="Tabla29" style:family="table">
      <style:table-properties style:width="15.766cm" fo:margin-left="0.009cm" fo:margin-top="0cm" fo:margin-bottom="0cm" table:align="left" style:writing-mode="page"/>
    </style:style>
    <style:style style:name="Tabla29.A" style:family="table-column">
      <style:table-column-properties style:column-width="4.38cm"/>
    </style:style>
    <style:style style:name="Tabla29.B" style:family="table-column">
      <style:table-column-properties style:column-width="3.26cm"/>
    </style:style>
    <style:style style:name="Tabla29.C" style:family="table-column">
      <style:table-column-properties style:column-width="8.124cm"/>
    </style:style>
    <style:style style:name="Tabla29.1" style:family="table-row">
      <style:table-row-properties style:min-row-height="0.617cm" fo:keep-together="auto"/>
    </style:style>
    <style:style style:name="Tabla29.A1" style:family="table-cell">
      <style:table-cell-properties fo:background-color="#aeaaaa" fo:padding-left="0.191cm" fo:padding-right="0.191cm" fo:padding-top="0cm" fo:padding-bottom="0cm" fo:border="0.5pt solid #000000">
        <style:background-image/>
      </style:table-cell-properties>
    </style:style>
    <style:style style:name="Tabla29.B1" style:family="table-cell">
      <style:table-cell-properties fo:padding-left="0.191cm" fo:padding-right="0.191cm" fo:padding-top="0cm" fo:padding-bottom="0cm" fo:border="0.5pt solid #000000"/>
    </style:style>
    <style:style style:name="Tabla29.2" style:family="table-row">
      <style:table-row-properties style:min-row-height="0.554cm" fo:keep-together="auto"/>
    </style:style>
    <style:style style:name="Tabla29.B2" style:family="table-cell">
      <style:table-cell-properties fo:padding-left="0.191cm" fo:padding-right="0.191cm" fo:padding-top="0cm" fo:padding-bottom="0cm" fo:border="0.5pt solid #000000"/>
    </style:style>
    <style:style style:name="Tabla29.3" style:family="table-row">
      <style:table-row-properties style:min-row-height="0.633cm" fo:keep-together="auto"/>
    </style:style>
    <style:style style:name="Tabla29.B3" style:family="table-cell">
      <style:table-cell-properties fo:padding-left="0.191cm" fo:padding-right="0.191cm" fo:padding-top="0cm" fo:padding-bottom="0cm" fo:border="0.5pt solid #000000"/>
    </style:style>
    <style:style style:name="Tabla29.4" style:family="table-row">
      <style:table-row-properties style:min-row-height="0.776cm" fo:keep-together="auto"/>
    </style:style>
    <style:style style:name="Tabla29.5" style:family="table-row">
      <style:table-row-properties style:min-row-height="0.536cm" fo:keep-together="auto"/>
    </style:style>
    <style:style style:name="Tabla29.A5" style:family="table-cell">
      <style:table-cell-properties fo:padding-left="0.191cm" fo:padding-right="0.191cm" fo:padding-top="0cm" fo:padding-bottom="0cm" fo:border="0.5pt solid #000000"/>
    </style:style>
    <style:style style:name="Tabla29.C5" style:family="table-cell">
      <style:table-cell-properties fo:padding-left="0.191cm" fo:padding-right="0.191cm" fo:padding-top="0cm" fo:padding-bottom="0cm" fo:border="0.5pt solid #000000"/>
    </style:style>
    <style:style style:name="Tabla29.6" style:family="table-row">
      <style:table-row-properties style:min-row-height="1.018cm" fo:keep-together="auto"/>
    </style:style>
    <style:style style:name="Tabla29.7" style:family="table-row">
      <style:table-row-properties style:min-row-height="0.57cm" fo:keep-together="auto"/>
    </style:style>
    <style:style style:name="Tabla29.A7" style:family="table-cell">
      <style:table-cell-properties fo:padding-left="0.191cm" fo:padding-right="0.191cm" fo:padding-top="0cm" fo:padding-bottom="0cm" fo:border="0.5pt solid #000000"/>
    </style:style>
    <style:style style:name="Tabla30" style:family="table">
      <style:table-properties style:width="14.982cm" fo:margin-left="0.009cm" fo:margin-top="0cm" fo:margin-bottom="0cm" table:align="left" style:writing-mode="page"/>
    </style:style>
    <style:style style:name="Tabla30.A" style:family="table-column">
      <style:table-column-properties style:column-width="4.196cm"/>
    </style:style>
    <style:style style:name="Tabla30.B" style:family="table-column">
      <style:table-column-properties style:column-width="3.059cm"/>
    </style:style>
    <style:style style:name="Tabla30.C" style:family="table-column">
      <style:table-column-properties style:column-width="7.726cm"/>
    </style:style>
    <style:style style:name="Tabla30.1" style:family="table-row">
      <style:table-row-properties fo:keep-together="auto"/>
    </style:style>
    <style:style style:name="Tabla30.A1" style:family="table-cell">
      <style:table-cell-properties fo:background-color="#aeaaaa" fo:padding-left="0.191cm" fo:padding-right="0.191cm" fo:padding-top="0cm" fo:padding-bottom="0cm" fo:border="0.5pt solid #000000">
        <style:background-image/>
      </style:table-cell-properties>
    </style:style>
    <style:style style:name="Tabla30.B1" style:family="table-cell">
      <style:table-cell-properties fo:padding-left="0.191cm" fo:padding-right="0.191cm" fo:padding-top="0cm" fo:padding-bottom="0cm" fo:border="0.5pt solid #000000"/>
    </style:style>
    <style:style style:name="Tabla30.B2" style:family="table-cell">
      <style:table-cell-properties fo:padding-left="0.191cm" fo:padding-right="0.191cm" fo:padding-top="0cm" fo:padding-bottom="0cm" fo:border="0.5pt solid #000000"/>
    </style:style>
    <style:style style:name="Tabla30.B3" style:family="table-cell">
      <style:table-cell-properties fo:padding-left="0.191cm" fo:padding-right="0.191cm" fo:padding-top="0cm" fo:padding-bottom="0cm" fo:border="0.5pt solid #000000"/>
    </style:style>
    <style:style style:name="Tabla30.4" style:family="table-row">
      <style:table-row-properties style:min-row-height="0.727cm" fo:keep-together="auto"/>
    </style:style>
    <style:style style:name="Tabla30.5" style:family="table-row">
      <style:table-row-properties style:min-row-height="0.503cm" fo:keep-together="auto"/>
    </style:style>
    <style:style style:name="Tabla30.A5" style:family="table-cell">
      <style:table-cell-properties fo:padding-left="0.191cm" fo:padding-right="0.191cm" fo:padding-top="0cm" fo:padding-bottom="0cm" fo:border="0.5pt solid #000000"/>
    </style:style>
    <style:style style:name="Tabla30.C5" style:family="table-cell">
      <style:table-cell-properties fo:padding-left="0.191cm" fo:padding-right="0.191cm" fo:padding-top="0cm" fo:padding-bottom="0cm" fo:border="0.5pt solid #000000"/>
    </style:style>
    <style:style style:name="Tabla30.A7" style:family="table-cell">
      <style:table-cell-properties fo:padding-left="0.191cm" fo:padding-right="0.191cm" fo:padding-top="0cm" fo:padding-bottom="0cm" fo:border="0.5pt solid #000000"/>
    </style:style>
    <style:style style:name="Tabla31" style:family="table">
      <style:table-properties style:width="14.34cm" fo:margin-left="0.347cm" fo:margin-top="0cm" fo:margin-bottom="0cm" table:align="left" style:writing-mode="page"/>
    </style:style>
    <style:style style:name="Tabla31.A" style:family="table-column">
      <style:table-column-properties style:column-width="5.567cm"/>
    </style:style>
    <style:style style:name="Tabla31.B" style:family="table-column">
      <style:table-column-properties style:column-width="1.739cm"/>
    </style:style>
    <style:style style:name="Tabla31.C" style:family="table-column">
      <style:table-column-properties style:column-width="1.79cm"/>
    </style:style>
    <style:style style:name="Tabla31.D" style:family="table-column">
      <style:table-column-properties style:column-width="1.201cm"/>
    </style:style>
    <style:style style:name="Tabla31.E" style:family="table-column">
      <style:table-column-properties style:column-width="1.718cm"/>
    </style:style>
    <style:style style:name="Tabla31.F" style:family="table-column">
      <style:table-column-properties style:column-width="0.974cm"/>
    </style:style>
    <style:style style:name="Tabla31.G" style:family="table-column">
      <style:table-column-properties style:column-width="1.349cm"/>
    </style:style>
    <style:style style:name="Tabla31.1" style:family="table-row">
      <style:table-row-properties style:min-row-height="1.524cm" fo:keep-together="auto"/>
    </style:style>
    <style:style style:name="Tabla31.A1" style:family="table-cell">
      <style:table-cell-properties fo:padding-left="0.191cm" fo:padding-right="0.191cm" fo:padding-top="0cm" fo:padding-bottom="0cm" fo:border="0.5pt solid #000000"/>
    </style:style>
    <style:style style:name="Tabla31.2" style:family="table-row">
      <style:table-row-properties style:min-row-height="0.508cm" fo:keep-together="auto"/>
    </style:style>
    <style:style style:name="Tabla32" style:family="table">
      <style:table-properties style:width="13.247cm" fo:margin-left="2.642cm" fo:margin-top="0cm" fo:margin-bottom="0cm" table:align="left" style:writing-mode="lr-tb"/>
    </style:style>
    <style:style style:name="Tabla32.A" style:family="table-column">
      <style:table-column-properties style:column-width="4.777cm"/>
    </style:style>
    <style:style style:name="Tabla32.B" style:family="table-column">
      <style:table-column-properties style:column-width="1.783cm"/>
    </style:style>
    <style:style style:name="Tabla32.C" style:family="table-column">
      <style:table-column-properties style:column-width="2.591cm"/>
    </style:style>
    <style:style style:name="Tabla32.D" style:family="table-column">
      <style:table-column-properties style:column-width="2.074cm"/>
    </style:style>
    <style:style style:name="Tabla32.E" style:family="table-column">
      <style:table-column-properties style:column-width="2.021cm"/>
    </style:style>
    <style:style style:name="Tabla32.1" style:family="table-row">
      <style:table-row-properties style:min-row-height="0.626cm" fo:keep-together="auto"/>
    </style:style>
    <style:style style:name="Tabla3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2.2" style:family="table-row">
      <style:table-row-properties style:min-row-height="0.102cm" fo:keep-together="auto"/>
    </style:style>
    <style:style style:name="Tabla32.A2" style:family="table-cell">
      <style:table-cell-properties style:vertical-align="middle" fo:padding-left="0.191cm" fo:padding-right="0.191cm" fo:padding-top="0cm" fo:padding-bottom="0cm" fo:border="none" style:writing-mode="lr-tb"/>
    </style:style>
    <style:style style:name="Tabla32.3" style:family="table-row">
      <style:table-row-properties style:min-row-height="0.12cm" fo:keep-together="auto"/>
    </style:style>
    <style:style style:name="Tabla32.6" style:family="table-row">
      <style:table-row-properties style:min-row-height="0.326cm" fo:keep-together="auto"/>
    </style:style>
    <style:style style:name="Tabla32.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3" style:family="table">
      <style:table-properties style:width="13.808cm" fo:margin-left="2.574cm" fo:margin-top="0cm" fo:margin-bottom="0cm" table:align="left" style:writing-mode="lr-tb"/>
    </style:style>
    <style:style style:name="Tabla33.A" style:family="table-column">
      <style:table-column-properties style:column-width="4.755cm"/>
    </style:style>
    <style:style style:name="Tabla33.B" style:family="table-column">
      <style:table-column-properties style:column-width="1.937cm"/>
    </style:style>
    <style:style style:name="Tabla33.C" style:family="table-column">
      <style:table-column-properties style:column-width="2.762cm"/>
    </style:style>
    <style:style style:name="Tabla33.D" style:family="table-column">
      <style:table-column-properties style:column-width="2.184cm"/>
    </style:style>
    <style:style style:name="Tabla33.E" style:family="table-column">
      <style:table-column-properties style:column-width="2.17cm"/>
    </style:style>
    <style:style style:name="Tabla33.1" style:family="table-row">
      <style:table-row-properties style:min-row-height="0.325cm" fo:keep-together="auto"/>
    </style:style>
    <style:style style:name="Tabla3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3.2" style:family="table-row">
      <style:table-row-properties style:min-row-height="0.584cm" fo:keep-together="auto"/>
    </style:style>
    <style:style style:name="Tabla33.A2" style:family="table-cell">
      <style:table-cell-properties style:vertical-align="middle" fo:padding-left="0.191cm" fo:padding-right="0.191cm" fo:padding-top="0cm" fo:padding-bottom="0cm" fo:border="none" style:writing-mode="lr-tb"/>
    </style:style>
    <style:style style:name="Tabla33.3" style:family="table-row">
      <style:table-row-properties style:min-row-height="0.374cm" fo:keep-together="auto"/>
    </style:style>
    <style:style style:name="Tabla33.4" style:family="table-row">
      <style:table-row-properties style:min-row-height="0.12cm" fo:keep-together="auto"/>
    </style:style>
    <style:style style:name="Tabla33.5" style:family="table-row">
      <style:table-row-properties style:min-row-height="0.279cm" fo:keep-together="auto"/>
    </style:style>
    <style:style style:name="Tabla33.6" style:family="table-row">
      <style:table-row-properties style:min-row-height="0.31cm" fo:keep-together="auto"/>
    </style:style>
    <style:style style:name="Tabla33.7" style:family="table-row">
      <style:table-row-properties style:min-row-height="0.183cm" fo:keep-together="auto"/>
    </style:style>
    <style:style style:name="Tabla33.9" style:family="table-row">
      <style:table-row-properties style:min-row-height="0.406cm" fo:keep-together="auto"/>
    </style:style>
    <style:style style:name="Tabla33.A10"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4" style:family="table">
      <style:table-properties style:width="11.139cm" fo:margin-left="2.529cm" fo:margin-top="0cm" fo:margin-bottom="0cm" table:align="left" style:writing-mode="lr-tb"/>
    </style:style>
    <style:style style:name="Tabla34.A" style:family="table-column">
      <style:table-column-properties style:column-width="5.059cm"/>
    </style:style>
    <style:style style:name="Tabla34.B" style:family="table-column">
      <style:table-column-properties style:column-width="2.642cm"/>
    </style:style>
    <style:style style:name="Tabla34.C" style:family="table-column">
      <style:table-column-properties style:column-width="3.438cm"/>
    </style:style>
    <style:style style:name="Tabla34.1" style:family="table-row">
      <style:table-row-properties style:min-row-height="0.436cm" fo:keep-together="auto"/>
    </style:style>
    <style:style style:name="Tabla34.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4.2" style:family="table-row">
      <style:table-row-properties style:min-row-height="0.452cm" fo:keep-together="auto"/>
    </style:style>
    <style:style style:name="Tabla34.A2" style:family="table-cell">
      <style:table-cell-properties style:vertical-align="middle" fo:padding-left="0.191cm" fo:padding-right="0.191cm" fo:padding-top="0cm" fo:padding-bottom="0cm" fo:border="none" style:writing-mode="lr-tb"/>
    </style:style>
    <style:style style:name="Tabla34.3" style:family="table-row">
      <style:table-row-properties style:min-row-height="0.485cm" fo:keep-together="auto"/>
    </style:style>
    <style:style style:name="Tabla34.4" style:family="table-row">
      <style:table-row-properties style:min-row-height="0.168cm" fo:keep-together="auto"/>
    </style:style>
    <style:style style:name="Tabla34.5" style:family="table-row">
      <style:table-row-properties style:min-row-height="0.326cm" fo:keep-together="auto"/>
    </style:style>
    <style:style style:name="Tabla34.6" style:family="table-row">
      <style:table-row-properties style:min-row-height="0.199cm" fo:keep-together="auto"/>
    </style:style>
    <style:style style:name="Tabla34.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5" style:family="table">
      <style:table-properties style:width="12.764cm" fo:margin-left="0cm" fo:margin-top="0cm" fo:margin-bottom="0cm" table:align="left" style:writing-mode="page"/>
    </style:style>
    <style:style style:name="Tabla35.A" style:family="table-column">
      <style:table-column-properties style:column-width="9.756cm"/>
    </style:style>
    <style:style style:name="Tabla35.B" style:family="table-column">
      <style:table-column-properties style:column-width="3.006cm"/>
    </style:style>
    <style:style style:name="Tabla35.1" style:family="table-row">
      <style:table-row-properties style:min-row-height="0.556cm" fo:keep-together="auto"/>
    </style:style>
    <style:style style:name="Tabla35.A1" style:family="table-cell">
      <style:table-cell-properties style:vertical-align="middle" fo:background-color="transparent" fo:padding-left="0.123cm" fo:padding-right="0.123cm" fo:padding-top="0cm" fo:padding-bottom="0cm" fo:border="none">
        <style:background-image/>
      </style:table-cell-properties>
    </style:style>
    <style:style style:name="Tabla35.6" style:family="table-row">
      <style:table-row-properties style:row-height="0.556cm" fo:keep-together="auto"/>
    </style:style>
    <style:style style:name="Tabla35.A9" style:family="table-cell">
      <style:table-cell-properties style:vertical-align="middle" fo:background-color="#ffff00" fo:padding-left="0.123cm" fo:padding-right="0.123cm" fo:padding-top="0cm" fo:padding-bottom="0cm" fo:border="none">
        <style:background-image/>
      </style:table-cell-properties>
    </style:style>
    <style:style style:name="Tabla36" style:family="table">
      <style:table-properties style:width="19.759cm" fo:margin-left="-3cm" fo:margin-top="0cm" fo:margin-bottom="0cm" table:align="left" style:writing-mode="lr-tb"/>
    </style:style>
    <style:style style:name="Tabla36.A" style:family="table-column">
      <style:table-column-properties style:column-width="5.001cm"/>
    </style:style>
    <style:style style:name="Tabla36.B" style:family="table-column">
      <style:table-column-properties style:column-width="1.75cm"/>
    </style:style>
    <style:style style:name="Tabla36.C" style:family="table-column">
      <style:table-column-properties style:column-width="1.894cm"/>
    </style:style>
    <style:style style:name="Tabla36.D" style:family="table-column">
      <style:table-column-properties style:column-width="2.57cm"/>
    </style:style>
    <style:style style:name="Tabla36.E" style:family="table-column">
      <style:table-column-properties style:column-width="2.914cm"/>
    </style:style>
    <style:style style:name="Tabla36.F" style:family="table-column">
      <style:table-column-properties style:column-width="2.716cm"/>
    </style:style>
    <style:style style:name="Tabla36.G" style:family="table-column">
      <style:table-column-properties style:column-width="2.912cm"/>
    </style:style>
    <style:style style:name="Tabla36.1" style:family="table-row">
      <style:table-row-properties style:min-row-height="1.005cm" fo:keep-together="auto"/>
    </style:style>
    <style:style style:name="Tabla3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6.2" style:family="table-row">
      <style:table-row-properties style:min-row-height="0.503cm" fo:keep-together="auto"/>
    </style:style>
    <style:style style:name="Tabla36.A2"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661cm" fo:keep-together="auto"/>
    </style:style>
    <style:style style:name="Tabla36.17" style:family="table-row">
      <style:table-row-properties style:min-row-height="0.529cm" fo:keep-together="auto"/>
    </style:style>
    <style:style style:name="Tabla36.A1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8" style:family="table">
      <style:table-properties style:rel-width="100%" fo:margin-left="0cm" fo:margin-top="0cm" fo:margin-bottom="0cm" table:align="left" style:writing-mode="lr-tb"/>
    </style:style>
    <style:style style:name="Tabla38.A" style:family="table-column">
      <style:table-column-properties style:rel-column-width="4417*"/>
    </style:style>
    <style:style style:name="Tabla38.B" style:family="table-column">
      <style:table-column-properties style:rel-column-width="4836*"/>
    </style:style>
    <style:style style:name="Tabla38.C" style:family="table-column">
      <style:table-column-properties style:rel-column-width="3985*"/>
    </style:style>
    <style:style style:name="Tabla38.D" style:family="table-column">
      <style:table-column-properties style:rel-column-width="3984*"/>
    </style:style>
    <style:style style:name="Tabla38.J" style:family="table-column">
      <style:table-column-properties style:rel-column-width="2058*"/>
    </style:style>
    <style:style style:name="Tabla38.K" style:family="table-column">
      <style:table-column-properties style:rel-column-width="1926*"/>
    </style:style>
    <style:style style:name="Tabla38.M" style:family="table-column">
      <style:table-column-properties style:rel-column-width="1927*"/>
    </style:style>
    <style:style style:name="Tabla38.N" style:family="table-column">
      <style:table-column-properties style:rel-column-width="2136*"/>
    </style:style>
    <style:style style:name="Tabla38.O" style:family="table-column">
      <style:table-column-properties style:rel-column-width="2019*"/>
    </style:style>
    <style:style style:name="Tabla38.P" style:family="table-column">
      <style:table-column-properties style:rel-column-width="2739*"/>
    </style:style>
    <style:style style:name="Tabla38.Q" style:family="table-column">
      <style:table-column-properties style:rel-column-width="2608*"/>
    </style:style>
    <style:style style:name="Tabla38.R" style:family="table-column">
      <style:table-column-properties style:rel-column-width="2740*"/>
    </style:style>
    <style:style style:name="Tabla38.T" style:family="table-column">
      <style:table-column-properties style:rel-column-width="1665*"/>
    </style:style>
    <style:style style:name="Tabla38.U" style:family="table-column">
      <style:table-column-properties style:rel-column-width="3906*"/>
    </style:style>
    <style:style style:name="Tabla38.1" style:family="table-row">
      <style:table-row-properties style:min-row-height="0.376cm" fo:keep-together="auto"/>
    </style:style>
    <style:style style:name="Tabla38.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8.2" style:family="table-row">
      <style:table-row-properties style:min-row-height="0.118cm" fo:keep-together="auto"/>
    </style:style>
    <style:style style:name="Tabla38.A2" style:family="table-cell">
      <style:table-cell-properties style:vertical-align="middle" fo:padding-left="0.191cm" fo:padding-right="0.191cm" fo:padding-top="0cm" fo:padding-bottom="0cm" fo:border="none" style:writing-mode="lr-tb"/>
    </style:style>
    <style:style style:name="Tabla38.7" style:family="table-row">
      <style:table-row-properties style:row-height="0.113cm" fo:keep-together="auto"/>
    </style:style>
    <style:style style:name="Tabla38.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9" style:family="table">
      <style:table-properties style:width="29.662cm" fo:margin-left="-2.501cm" fo:margin-top="0cm" fo:margin-bottom="0cm" table:align="left" style:writing-mode="lr-tb"/>
    </style:style>
    <style:style style:name="Tabla39.A" style:family="table-column">
      <style:table-column-properties style:column-width="1.12cm"/>
    </style:style>
    <style:style style:name="Tabla39.B" style:family="table-column">
      <style:table-column-properties style:column-width="0.383cm"/>
    </style:style>
    <style:style style:name="Tabla39.C" style:family="table-column">
      <style:table-column-properties style:column-width="1.367cm"/>
    </style:style>
    <style:style style:name="Tabla39.D" style:family="table-column">
      <style:table-column-properties style:column-width="2cm"/>
    </style:style>
    <style:style style:name="Tabla39.E" style:family="table-column">
      <style:table-column-properties style:column-width="1.633cm"/>
    </style:style>
    <style:style style:name="Tabla39.F" style:family="table-column">
      <style:table-column-properties style:column-width="1.833cm"/>
    </style:style>
    <style:style style:name="Tabla39.G" style:family="table-column">
      <style:table-column-properties style:column-width="2.006cm"/>
    </style:style>
    <style:style style:name="Tabla39.J" style:family="table-column">
      <style:table-column-properties style:column-width="2.007cm"/>
    </style:style>
    <style:style style:name="Tabla39.M" style:family="table-column">
      <style:table-column-properties style:column-width="2.277cm"/>
    </style:style>
    <style:style style:name="Tabla39.N" style:family="table-column">
      <style:table-column-properties style:column-width="2.279cm"/>
    </style:style>
    <style:style style:name="Tabla39.O" style:family="table-column">
      <style:table-column-properties style:column-width="2.281cm"/>
    </style:style>
    <style:style style:name="Tabla39.P" style:family="table-column">
      <style:table-column-properties style:column-width="2.454cm"/>
    </style:style>
    <style:style style:name="Tabla39.1" style:family="table-row">
      <style:table-row-properties style:min-row-height="1.058cm" fo:keep-together="auto"/>
    </style:style>
    <style:style style:name="Tabla39.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9.2" style:family="table-row">
      <style:table-row-properties style:min-row-height="0.529cm" fo:keep-together="auto"/>
    </style:style>
    <style:style style:name="Tabla39.A2" style:family="table-cell">
      <style:table-cell-properties style:vertical-align="middle" fo:padding-left="0.191cm" fo:padding-right="0.191cm" fo:padding-top="0cm" fo:padding-bottom="0cm" fo:border="none" style:writing-mode="lr-tb"/>
    </style:style>
    <style:style style:name="Tabla39.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1" style:family="table">
      <style:table-properties style:width="9.287cm" fo:margin-left="2.06cm" fo:margin-top="0cm" fo:margin-bottom="0cm" table:align="left" style:writing-mode="lr-tb"/>
    </style:style>
    <style:style style:name="Tabla41.A" style:family="table-column">
      <style:table-column-properties style:column-width="5.75cm"/>
    </style:style>
    <style:style style:name="Tabla41.B" style:family="table-column">
      <style:table-column-properties style:column-width="3.535cm"/>
    </style:style>
    <style:style style:name="Tabla41.1" style:family="table-row">
      <style:table-row-properties style:min-row-height="0.529cm" fo:keep-together="auto"/>
    </style:style>
    <style:style style:name="Tabla4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41.A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41.A3" style:family="table-cell">
      <style:table-cell-properties style:vertical-align="middle" fo:padding-left="0.191cm" fo:padding-right="0.191cm" fo:padding-top="0cm" fo:padding-bottom="0cm" fo:border="none" style:writing-mode="lr-tb"/>
    </style:style>
    <style:style style:name="Tabla41.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1.14" style:family="table-row">
      <style:table-row-properties style:min-row-height="0.556cm" fo:keep-together="auto"/>
    </style:style>
    <style:style style:name="Tabla42" style:family="table">
      <style:table-properties style:width="18.403cm" fo:margin-top="0cm" fo:margin-bottom="0cm" table:align="center" style:writing-mode="lr-tb"/>
    </style:style>
    <style:style style:name="Tabla42.A" style:family="table-column">
      <style:table-column-properties style:column-width="5.817cm"/>
    </style:style>
    <style:style style:name="Tabla42.B" style:family="table-column">
      <style:table-column-properties style:column-width="2.517cm"/>
    </style:style>
    <style:style style:name="Tabla42.D" style:family="table-column">
      <style:table-column-properties style:column-width="2.515cm"/>
    </style:style>
    <style:style style:name="Tabla42.1" style:family="table-row">
      <style:table-row-properties style:min-row-height="0.485cm" fo:keep-together="auto"/>
    </style:style>
    <style:style style:name="Tabla4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42.A2"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462cm" fo:keep-together="auto"/>
    </style:style>
    <style:style style:name="Tabla42.A18"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3" style:family="table">
      <style:table-properties style:width="9.001cm" fo:margin-left="2.732cm" fo:margin-top="0cm" fo:margin-bottom="0cm" table:align="left" style:writing-mode="lr-tb"/>
    </style:style>
    <style:style style:name="Tabla43.A" style:family="table-column">
      <style:table-column-properties style:column-width="3.51cm"/>
    </style:style>
    <style:style style:name="Tabla43.B" style:family="table-column">
      <style:table-column-properties style:column-width="3.064cm"/>
    </style:style>
    <style:style style:name="Tabla43.C" style:family="table-column">
      <style:table-column-properties style:column-width="2.427cm"/>
    </style:style>
    <style:style style:name="Tabla43.1" style:family="table-row">
      <style:table-row-properties style:min-row-height="0.529cm" fo:keep-together="auto"/>
    </style:style>
    <style:style style:name="Tabla4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43.A2" style:family="table-cell">
      <style:table-cell-properties style:vertical-align="middle" fo:padding-left="0.191cm" fo:padding-right="0.191cm" fo:padding-top="0cm" fo:padding-bottom="0cm" fo:border="none" style:writing-mode="lr-tb"/>
    </style:style>
    <style:style style:name="Tabla43.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4" style:family="table">
      <style:table-properties style:rel-width="64%" fo:margin-left="0cm" fo:margin-top="0cm" fo:margin-bottom="0cm" table:align="left" style:writing-mode="lr-tb"/>
    </style:style>
    <style:style style:name="Tabla44.A" style:family="table-column">
      <style:table-column-properties style:rel-column-width="37839*"/>
    </style:style>
    <style:style style:name="Tabla44.B" style:family="table-column">
      <style:table-column-properties style:rel-column-width="21162*"/>
    </style:style>
    <style:style style:name="Tabla44.C" style:family="table-column">
      <style:table-column-properties style:rel-column-width="2175*"/>
    </style:style>
    <style:style style:name="Tabla44.D" style:family="table-column">
      <style:table-column-properties style:rel-column-width="2183*"/>
    </style:style>
    <style:style style:name="Tabla44.E" style:family="table-column">
      <style:table-column-properties style:rel-column-width="2176*"/>
    </style:style>
    <style:style style:name="Tabla44.1" style:family="table-row">
      <style:table-row-properties style:min-row-height="0.582cm" fo:keep-together="auto"/>
    </style:style>
    <style:style style:name="Tabla44.A1" style:family="table-cell">
      <style:table-cell-properties fo:padding-left="0.191cm" fo:padding-right="0.191cm" fo:padding-top="0cm" fo:padding-bottom="0cm" fo:border="none" style:writing-mode="lr-tb"/>
    </style:style>
    <style:style style:name="Tabla44.A2" style:family="table-cell">
      <style:table-cell-properties fo:background-color="#f2f2f2" fo:padding-left="0.191cm" fo:padding-right="0.191cm" fo:padding-top="0cm" fo:padding-bottom="0cm" fo:border="none" style:writing-mode="lr-tb">
        <style:background-image/>
      </style:table-cell-properties>
    </style:style>
    <style:style style:name="Tabla44.11" style:family="table-row">
      <style:table-row-properties style:min-row-height="0.556cm" fo:keep-together="auto"/>
    </style:style>
    <style:style style:name="Tabla46" style:family="table">
      <style:table-properties style:width="15.305cm" fo:margin-top="0cm" fo:margin-bottom="0cm" table:align="center" style:writing-mode="lr-tb"/>
    </style:style>
    <style:style style:name="Tabla46.A" style:family="table-column">
      <style:table-column-properties style:column-width="1.48cm"/>
    </style:style>
    <style:style style:name="Tabla46.B" style:family="table-column">
      <style:table-column-properties style:column-width="2.489cm"/>
    </style:style>
    <style:style style:name="Tabla46.C" style:family="table-column">
      <style:table-column-properties style:column-width="2.252cm"/>
    </style:style>
    <style:style style:name="Tabla46.D" style:family="table-column">
      <style:table-column-properties style:column-width="2.106cm"/>
    </style:style>
    <style:style style:name="Tabla46.E" style:family="table-column">
      <style:table-column-properties style:column-width="2.766cm"/>
    </style:style>
    <style:style style:name="Tabla46.F" style:family="table-column">
      <style:table-column-properties style:column-width="1.958cm"/>
    </style:style>
    <style:style style:name="Tabla46.1" style:family="table-row">
      <style:table-row-properties style:min-row-height="0.568cm" fo:keep-together="auto"/>
    </style:style>
    <style:style style:name="Tabla4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46.2" style:family="table-row">
      <style:table-row-properties style:min-row-height="0.529cm" fo:keep-together="auto"/>
    </style:style>
    <style:style style:name="Tabla46.A2" style:family="table-cell">
      <style:table-cell-properties style:vertical-align="middle" fo:padding-left="0.191cm" fo:padding-right="0.191cm" fo:padding-top="0cm" fo:padding-bottom="0cm" fo:border="none" style:writing-mode="lr-tb"/>
    </style:style>
    <style:style style:name="Tabla46.A39"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48" style:family="table">
      <style:table-properties style:width="18.311cm" fo:margin-left="-2cm" fo:margin-top="0cm" fo:margin-bottom="0cm" table:align="left" style:writing-mode="lr-tb"/>
    </style:style>
    <style:style style:name="Tabla48.A" style:family="table-column">
      <style:table-column-properties style:column-width="4.62cm"/>
    </style:style>
    <style:style style:name="Tabla48.B" style:family="table-column">
      <style:table-column-properties style:column-width="2.745cm"/>
    </style:style>
    <style:style style:name="Tabla48.C" style:family="table-column">
      <style:table-column-properties style:column-width="0.646cm"/>
    </style:style>
    <style:style style:name="Tabla48.D" style:family="table-column">
      <style:table-column-properties style:column-width="1.438cm"/>
    </style:style>
    <style:style style:name="Tabla48.F" style:family="table-column">
      <style:table-column-properties style:column-width="1.439cm"/>
    </style:style>
    <style:style style:name="Tabla48.H" style:family="table-column">
      <style:table-column-properties style:column-width="4.546cm"/>
    </style:style>
    <style:style style:name="Tabla48.1" style:family="table-row">
      <style:table-row-properties style:min-row-height="0.508cm" fo:keep-together="auto"/>
    </style:style>
    <style:style style:name="Tabla48.A1" style:family="table-cell">
      <style:table-cell-properties fo:padding-left="0.191cm" fo:padding-right="0.191cm" fo:padding-top="0cm" fo:padding-bottom="0cm" fo:border="none" style:writing-mode="lr-tb"/>
    </style:style>
    <style:style style:name="Tabla48.A2" style:family="table-cell">
      <style:table-cell-properties fo:background-color="#f2f2f2" fo:padding-left="0.191cm" fo:padding-right="0.191cm" fo:padding-top="0cm" fo:padding-bottom="0cm" fo:border="none" style:writing-mode="lr-tb">
        <style:background-image/>
      </style:table-cell-properties>
    </style:style>
    <style:style style:name="Tabla48.3" style:family="table-row">
      <style:table-row-properties style:min-row-height="0.55cm" fo:keep-together="auto"/>
    </style:style>
    <style:style style:name="Tabla49" style:family="table">
      <style:table-properties style:width="15.503cm" fo:margin-left="-1.501cm" fo:margin-top="0cm" fo:margin-bottom="0cm" table:align="left" style:writing-mode="lr-tb"/>
    </style:style>
    <style:style style:name="Tabla49.A" style:family="table-column">
      <style:table-column-properties style:column-width="3.75cm"/>
    </style:style>
    <style:style style:name="Tabla49.B" style:family="table-column">
      <style:table-column-properties style:column-width="2cm"/>
    </style:style>
    <style:style style:name="Tabla49.C" style:family="table-column">
      <style:table-column-properties style:column-width="9.753cm"/>
    </style:style>
    <style:style style:name="Tabla49.1" style:family="table-row">
      <style:table-row-properties style:min-row-height="0.423cm" fo:keep-together="auto"/>
    </style:style>
    <style:style style:name="Tabla49.A1" style:family="table-cell">
      <style:table-cell-properties fo:padding-left="0.191cm" fo:padding-right="0.191cm" fo:padding-top="0cm" fo:padding-bottom="0cm" fo:border="none" style:writing-mode="lr-tb"/>
    </style:style>
    <style:style style:name="Tabla49.A2" style:family="table-cell">
      <style:table-cell-properties fo:background-color="#f2f2f2" fo:padding-left="0.191cm" fo:padding-right="0.191cm" fo:padding-top="0cm" fo:padding-bottom="0cm" fo:border="none" style:writing-mode="lr-tb">
        <style:background-image/>
      </style:table-cell-properties>
    </style:style>
    <style:style style:name="Tabla49.3" style:family="table-row">
      <style:table-row-properties style:min-row-height="0.503cm" fo:keep-together="auto"/>
    </style:style>
    <style:style style:name="Tabla49.7" style:family="table-row">
      <style:table-row-properties style:min-row-height="0.529cm" fo:keep-together="auto"/>
    </style:style>
    <style:style style:name="Tabla51" style:family="table">
      <style:table-properties style:width="23.088cm" fo:margin-left="0cm" fo:margin-top="0cm" fo:margin-bottom="0cm" table:align="left" style:writing-mode="lr-tb"/>
    </style:style>
    <style:style style:name="Tabla51.A" style:family="table-column">
      <style:table-column-properties style:column-width="6.893cm"/>
    </style:style>
    <style:style style:name="Tabla51.B" style:family="table-column">
      <style:table-column-properties style:column-width="2.699cm"/>
    </style:style>
    <style:style style:name="Tabla51.1" style:family="table-row">
      <style:table-row-properties style:min-row-height="0.529cm" fo:keep-together="auto"/>
    </style:style>
    <style:style style:name="Tabla5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1.A2" style:family="table-cell">
      <style:table-cell-properties style:vertical-align="middle" fo:padding-left="0.191cm" fo:padding-right="0.191cm" fo:padding-top="0cm" fo:padding-bottom="0cm" fo:border="none" style:writing-mode="lr-tb"/>
    </style:style>
    <style:style style:name="Tabla51.18" style:family="table-row">
      <style:table-row-properties style:min-row-height="0.556cm" fo:keep-together="auto"/>
    </style:style>
    <style:style style:name="Tabla51.A2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53" style:family="table">
      <style:table-properties style:width="13.656cm" fo:margin-left="2.528cm" fo:margin-top="0cm" fo:margin-bottom="0cm" table:align="left" style:writing-mode="lr-tb"/>
    </style:style>
    <style:style style:name="Tabla53.A" style:family="table-column">
      <style:table-column-properties style:column-width="1.558cm"/>
    </style:style>
    <style:style style:name="Tabla53.B" style:family="table-column">
      <style:table-column-properties style:column-width="1.967cm"/>
    </style:style>
    <style:style style:name="Tabla53.C" style:family="table-column">
      <style:table-column-properties style:column-width="7.235cm"/>
    </style:style>
    <style:style style:name="Tabla53.D" style:family="table-column">
      <style:table-column-properties style:column-width="1.092cm"/>
    </style:style>
    <style:style style:name="Tabla53.E" style:family="table-column">
      <style:table-column-properties style:column-width="0.236cm"/>
    </style:style>
    <style:style style:name="Tabla53.F" style:family="table-column">
      <style:table-column-properties style:column-width="0.196cm"/>
    </style:style>
    <style:style style:name="Tabla53.G" style:family="table-column">
      <style:table-column-properties style:column-width="0.198cm"/>
    </style:style>
    <style:style style:name="Tabla53.H" style:family="table-column">
      <style:table-column-properties style:column-width="0.194cm"/>
    </style:style>
    <style:style style:name="Tabla53.J" style:family="table-column">
      <style:table-column-properties style:column-width="0.39cm"/>
    </style:style>
    <style:style style:name="Tabla53.K" style:family="table-column">
      <style:table-column-properties style:column-width="0.392cm"/>
    </style:style>
    <style:style style:name="Tabla53.1" style:family="table-row">
      <style:table-row-properties style:min-row-height="0.469cm" fo:keep-together="auto"/>
    </style:style>
    <style:style style:name="Tabla5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3.J1" style:family="table-cell">
      <style:table-cell-properties style:vertical-align="" fo:padding-left="0.191cm" fo:padding-right="0.191cm" fo:padding-top="0cm" fo:padding-bottom="0cm" fo:border-left="none" fo:border-right="none" fo:border-top="0.5pt solid #000000" fo:border-bottom="0.5pt solid #000000" style:writing-mode="lr-tb"/>
    </style:style>
    <style:style style:name="Tabla53.K1" style:family="table-cell">
      <style:table-cell-properties style:vertical-align="middle" fo:padding-left="0.191cm" fo:padding-right="0.191cm" fo:padding-top="0cm" fo:padding-bottom="0cm" fo:border="none" style:writing-mode="lr-tb"/>
    </style:style>
    <style:style style:name="Tabla53.G2" style:family="table-cell">
      <style:table-cell-properties style:vertical-align="" fo:padding-left="0.191cm" fo:padding-right="0.191cm" fo:padding-top="0cm" fo:padding-bottom="0cm" fo:border="none" style:writing-mode="lr-tb"/>
    </style:style>
    <style:style style:name="Tabla53.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54" style:family="table">
      <style:table-properties style:width="17.251cm" fo:margin-left="0.25cm" fo:margin-top="0cm" fo:margin-bottom="0cm" table:align="left" style:writing-mode="lr-tb"/>
    </style:style>
    <style:style style:name="Tabla54.A" style:family="table-column">
      <style:table-column-properties style:column-width="2.009cm"/>
    </style:style>
    <style:style style:name="Tabla54.B" style:family="table-column">
      <style:table-column-properties style:column-width="1.76cm"/>
    </style:style>
    <style:style style:name="Tabla54.C" style:family="table-column">
      <style:table-column-properties style:column-width="2.016cm"/>
    </style:style>
    <style:style style:name="Tabla54.D" style:family="table-column">
      <style:table-column-properties style:column-width="4.951cm"/>
    </style:style>
    <style:style style:name="Tabla54.E" style:family="table-column">
      <style:table-column-properties style:column-width="0.492cm"/>
    </style:style>
    <style:style style:name="Tabla54.F" style:family="table-column">
      <style:table-column-properties style:column-width="0.474cm"/>
    </style:style>
    <style:style style:name="Tabla54.H" style:family="table-column">
      <style:table-column-properties style:column-width="0.22cm"/>
    </style:style>
    <style:style style:name="Tabla54.I" style:family="table-column">
      <style:table-column-properties style:column-width="0.443cm"/>
    </style:style>
    <style:style style:name="Tabla54.J" style:family="table-column">
      <style:table-column-properties style:column-width="2.662cm"/>
    </style:style>
    <style:style style:name="Tabla54.K" style:family="table-column">
      <style:table-column-properties style:column-width="0.497cm"/>
    </style:style>
    <style:style style:name="Tabla54.L" style:family="table-column">
      <style:table-column-properties style:column-width="0.416cm"/>
    </style:style>
    <style:style style:name="Tabla54.M" style:family="table-column">
      <style:table-column-properties style:column-width="0.418cm"/>
    </style:style>
    <style:style style:name="Tabla54.N" style:family="table-column">
      <style:table-column-properties style:column-width="0.415cm"/>
    </style:style>
    <style:style style:name="Tabla54.1" style:family="table-row">
      <style:table-row-properties style:min-row-height="0.436cm" fo:keep-together="auto"/>
    </style:style>
    <style:style style:name="Tabla54.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4.I1" style:family="table-cell">
      <style:table-cell-properties style:vertical-align="" fo:padding-left="0.191cm" fo:padding-right="0.191cm" fo:padding-top="0cm" fo:padding-bottom="0cm" fo:border-left="none" fo:border-right="none" fo:border-top="0.5pt solid #000000" fo:border-bottom="0.5pt solid #000000" style:writing-mode="lr-tb"/>
    </style:style>
    <style:style style:name="Tabla54.L1" style:family="table-cell">
      <style:table-cell-properties style:vertical-align="middle" fo:padding-left="0.191cm" fo:padding-right="0.191cm" fo:padding-top="0cm" fo:padding-bottom="0cm" fo:border="none" style:writing-mode="lr-tb"/>
    </style:style>
    <style:style style:name="Tabla54.K2" style:family="table-cell">
      <style:table-cell-properties style:vertical-align="" fo:padding-left="0.191cm" fo:padding-right="0.191cm" fo:padding-top="0cm" fo:padding-bottom="0cm" fo:border="none" style:writing-mode="lr-tb"/>
    </style:style>
    <style:style style:name="Tabla54.A8"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54.I8"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a55" style:family="table">
      <style:table-properties style:width="13.4cm" fo:margin-left="1.251cm" fo:margin-top="0cm" fo:margin-bottom="0cm" table:align="left" style:writing-mode="lr-tb"/>
    </style:style>
    <style:style style:name="Tabla55.A" style:family="table-column">
      <style:table-column-properties style:column-width="2.649cm"/>
    </style:style>
    <style:style style:name="Tabla55.B" style:family="table-column">
      <style:table-column-properties style:column-width="4.159cm"/>
    </style:style>
    <style:style style:name="Tabla55.C" style:family="table-column">
      <style:table-column-properties style:column-width="1.744cm"/>
    </style:style>
    <style:style style:name="Tabla55.D" style:family="table-column">
      <style:table-column-properties style:column-width="1.741cm"/>
    </style:style>
    <style:style style:name="Tabla55.E" style:family="table-column">
      <style:table-column-properties style:column-width="2.32cm"/>
    </style:style>
    <style:style style:name="Tabla55.F" style:family="table-column">
      <style:table-column-properties style:column-width="0.392cm"/>
    </style:style>
    <style:style style:name="Tabla55.G" style:family="table-column">
      <style:table-column-properties style:column-width="0.393cm"/>
    </style:style>
    <style:style style:name="Tabla55.1" style:family="table-row">
      <style:table-row-properties style:min-row-height="0.529cm" fo:keep-together="auto"/>
    </style:style>
    <style:style style:name="Tabla55.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5.2" style:family="table-row">
      <style:table-row-properties style:row-height="0.529cm" fo:keep-together="auto"/>
    </style:style>
    <style:style style:name="Tabla55.A2" style:family="table-cell">
      <style:table-cell-properties style:vertical-align="middle" fo:padding-left="0.191cm" fo:padding-right="0.191cm" fo:padding-top="0cm" fo:padding-bottom="0cm" fo:border="none" style:writing-mode="lr-tb"/>
    </style:style>
    <style:style style:name="Tabla55.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56" style:family="table">
      <style:table-properties style:width="13.284cm" fo:margin-left="1.251cm" fo:margin-top="0cm" fo:margin-bottom="0cm" table:align="left" style:writing-mode="lr-tb"/>
    </style:style>
    <style:style style:name="Tabla56.A" style:family="table-column">
      <style:table-column-properties style:column-width="2.828cm"/>
    </style:style>
    <style:style style:name="Tabla56.B" style:family="table-column">
      <style:table-column-properties style:column-width="4.128cm"/>
    </style:style>
    <style:style style:name="Tabla56.C" style:family="table-column">
      <style:table-column-properties style:column-width="4.466cm"/>
    </style:style>
    <style:style style:name="Tabla56.D" style:family="table-column">
      <style:table-column-properties style:column-width="0.538cm"/>
    </style:style>
    <style:style style:name="Tabla56.E" style:family="table-column">
      <style:table-column-properties style:column-width="0.54cm"/>
    </style:style>
    <style:style style:name="Tabla56.F" style:family="table-column">
      <style:table-column-properties style:column-width="0.392cm"/>
    </style:style>
    <style:style style:name="Tabla56.1" style:family="table-row">
      <style:table-row-properties style:min-row-height="0.529cm" fo:keep-together="auto"/>
    </style:style>
    <style:style style:name="Tabla5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56.2" style:family="table-row">
      <style:table-row-properties style:row-height="0.529cm" fo:keep-together="auto"/>
    </style:style>
    <style:style style:name="Tabla56.A2" style:family="table-cell">
      <style:table-cell-properties style:vertical-align="middle" fo:padding-left="0.191cm" fo:padding-right="0.191cm" fo:padding-top="0cm" fo:padding-bottom="0cm" fo:border="none" style:writing-mode="lr-tb"/>
    </style:style>
    <style:style style:name="Tabla56.A8"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2"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3"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4" style:family="paragraph" style:parent-style-name="List_20_Paragraph" style:list-style-name="WWNum14">
      <style:paragraph-properties fo:margin-top="0cm" fo:margin-bottom="0cm" style:contextual-spacing="true" fo:line-height="150%" fo:orphans="2" fo:widows="2"/>
      <style:text-properties style:letter-kerning="false" style:font-name-asian="Times New Roman1" style:language-complex="ar" style:country-complex="SA"/>
    </style:style>
    <style:style style:name="P5" style:family="paragraph" style:parent-style-name="List_20_Paragraph" style:list-style-name="WWNum18">
      <style:paragraph-properties fo:margin-top="0cm" fo:margin-bottom="0cm" style:contextual-spacing="true" fo:line-height="150%" fo:orphans="2" fo:widows="2"/>
      <style:text-properties style:letter-kerning="false" style:font-name-asian="Times New Roman1" style:language-complex="ar" style:country-complex="SA"/>
    </style:style>
    <style:style style:name="P6"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7"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8" style:family="paragraph" style:parent-style-name="List_20_Paragraph" style:list-style-name="WWNum15">
      <style:paragraph-properties fo:margin-top="0cm" fo:margin-bottom="0cm" style:contextual-spacing="true" fo:line-height="150%" fo:orphans="2" fo:widows="2"/>
      <style:text-properties style:letter-kerning="false" style:font-name-asian="Times New Roman1" style:language-complex="ar" style:country-complex="SA"/>
    </style:style>
    <style:style style:name="P9" style:family="paragraph" style:parent-style-name="List_20_Paragraph" style:list-style-name="WWNum15">
      <style:paragraph-properties fo:margin-top="0cm" fo:margin-bottom="0cm" style:contextual-spacing="true" fo:line-height="150%" fo:orphans="2" fo:widows="2"/>
      <style:text-properties style:letter-kerning="false" style:font-name-asian="Times New Roman1" style:language-complex="ar" style:country-complex="SA"/>
    </style:style>
    <style:style style:name="P10"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11"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12"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Times New Roman1" style:language-complex="ar" style:country-complex="SA"/>
    </style:style>
    <style:style style:name="P13"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14"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15"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16" style:family="paragraph" style:parent-style-name="List_20_Paragraph" style:list-style-name="WWNum6">
      <style:paragraph-properties fo:margin-top="0cm" fo:margin-bottom="0cm" style:contextual-spacing="true" fo:line-height="150%" fo:orphans="2" fo:widows="2"/>
      <style:text-properties style:letter-kerning="false" style:font-name-asian="Calibri1" style:language-complex="ar" style:country-complex="SA"/>
    </style:style>
    <style:style style:name="P17" style:family="paragraph" style:parent-style-name="List_20_Paragraph" style:list-style-name="WWNum5">
      <style:paragraph-properties fo:margin-top="0cm" fo:margin-bottom="0cm" style:contextual-spacing="true" fo:line-height="150%" fo:orphans="2" fo:widows="2"/>
      <style:text-properties style:letter-kerning="false" style:font-name-asian="Calibri1" style:language-complex="ar" style:country-complex="SA"/>
    </style:style>
    <style:style style:name="P18" style:family="paragraph" style:parent-style-name="List_20_Paragraph" style:list-style-name="WWNum5">
      <style:paragraph-properties fo:margin-top="0cm" fo:margin-bottom="0cm" style:contextual-spacing="true" fo:line-height="150%" fo:orphans="2" fo:widows="2"/>
      <style:text-properties style:letter-kerning="false" style:font-name-asian="Calibri1" style:language-complex="ar" style:country-complex="SA"/>
    </style:style>
    <style:style style:name="P19"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20"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21"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22"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23"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24"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25"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26"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27"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28" style:family="paragraph" style:parent-style-name="Standard">
      <style:paragraph-properties fo:margin-top="0cm" fo:margin-bottom="0cm" style:contextual-spacing="false" fo:orphans="2" fo:widows="2"/>
      <style:text-properties style:letter-kerning="false" style:font-name-asian="Calibri1" style:language-complex="ar" style:country-complex="SA"/>
    </style:style>
    <style:style style:name="P29" style:family="paragraph" style:parent-style-name="Título_20_11" style:list-style-name="WWNum12">
      <style:paragraph-properties fo:margin-top="0cm" fo:margin-bottom="0cm" style:contextual-spacing="false" fo:line-height="150%" fo:orphans="2" fo:widows="2"/>
      <style:text-properties style:letter-kerning="false" style:language-complex="ar" style:country-complex="SA"/>
    </style:style>
    <style:style style:name="P30" style:family="paragraph" style:parent-style-name="Standard">
      <style:paragraph-properties fo:margin-top="0cm" fo:margin-bottom="0cm" style:contextual-spacing="false" fo:line-height="150%" fo:orphans="2" fo:widows="2"/>
      <style:text-properties fo:font-size="11pt" style:letter-kerning="false" style:font-name-asian="Calibri1" style:font-size-asian="11pt" style:font-size-complex="11pt" style:language-complex="ar" style:country-complex="SA"/>
    </style:style>
    <style:style style:name="P31"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name-asian="Calibri1" style:font-size-asian="11pt" style:font-size-complex="11pt" style:language-complex="ar" style:country-complex="SA"/>
    </style:style>
    <style:style style:name="P32" style:family="paragraph" style:parent-style-name="Standard">
      <style:paragraph-properties fo:margin-top="0cm" fo:margin-bottom="0cm" style:contextual-spacing="false" fo:line-height="150%" fo:orphans="2" fo:widows="2"/>
      <style:text-properties fo:font-size="11pt" style:letter-kerning="false" style:font-name-asian="Times New Roman1" style:font-size-asian="11pt" style:font-size-complex="11pt" style:language-complex="ar" style:country-complex="SA"/>
    </style:style>
    <style:style style:name="P33" style:family="paragraph" style:parent-style-name="Standard">
      <style:paragraph-properties fo:margin-top="0cm" fo:margin-bottom="0cm" style:contextual-spacing="false" fo:line-height="150%" fo:orphans="2" fo:widows="2"/>
      <style:text-properties fo:font-size="11pt" fo:font-weight="bold" style:letter-kerning="false" style:font-name-asian="Calibri1" style:font-size-asian="11pt" style:font-weight-asian="bold" style:font-size-complex="11pt" style:language-complex="ar" style:country-complex="SA" style:font-weight-complex="bold"/>
    </style:style>
    <style:style style:name="P34" style:family="paragraph" style:parent-style-name="Standard">
      <style:paragraph-properties fo:margin-top="0cm" fo:margin-bottom="0cm" style:contextual-spacing="false" fo:line-height="150%" fo:text-align="center" style:justify-single-word="false"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35"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36"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37" style:family="paragraph" style:parent-style-name="Standard">
      <style:paragraph-properties fo:margin-top="0cm" fo:margin-bottom="0cm" style:contextual-spacing="false" fo:line-height="150%" fo:orphans="2" fo:widows="2" fo:text-indent="0cm" style:auto-text-indent="false"/>
      <style:text-properties fo:font-size="11pt" fo:language="es" fo:country="ES" style:letter-kerning="false" style:font-name-asian="Calibri1" style:font-size-asian="11pt" style:language-asian="es" style:country-asian="PE" style:font-size-complex="11pt" style:language-complex="ar" style:country-complex="SA"/>
    </style:style>
    <style:style style:name="P38"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font-size-complex="11pt" style:language-complex="ar" style:country-complex="SA"/>
    </style:style>
    <style:style style:name="P39"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font-size-complex="11pt" style:language-complex="ar" style:country-complex="SA"/>
    </style:style>
    <style:style style:name="P40" style:family="paragraph" style:parent-style-name="Standard">
      <style:paragraph-properties fo:margin-top="0cm" fo:margin-bottom="0cm" style:contextual-spacing="false" fo:line-height="150%" fo:orphans="2" fo:widows="2" fo:text-indent="0cm" style:auto-text-indent="false"/>
      <style:text-properties fo:font-size="11pt" fo:language="es" fo:country="ES" style:letter-kerning="false" style:font-name-asian="Times New Roman1" style:font-size-asian="11pt" style:language-asian="es" style:country-asian="PE" style:font-size-complex="11pt" style:language-complex="ar" style:country-complex="SA"/>
    </style:style>
    <style:style style:name="P41" style:family="paragraph" style:parent-style-name="Standard">
      <style:paragraph-properties fo:margin-top="0cm" fo:margin-bottom="0cm" style:contextual-spacing="false" fo:line-height="150%" fo:orphans="2" fo:widows="2"/>
      <style:text-properties fo:font-weight="bold" style:letter-kerning="false" style:font-name-asian="Calibri1" style:font-weight-asian="bold" style:language-complex="ar" style:country-complex="SA" style:font-weight-complex="bold"/>
    </style:style>
    <style:style style:name="P42" style:family="paragraph" style:parent-style-name="Standard">
      <style:paragraph-properties fo:margin-top="0cm" fo:margin-bottom="0cm" style:contextual-spacing="false" fo:line-height="150%" fo:orphans="2" fo:widows="2"/>
      <style:text-properties fo:font-weight="bold" style:letter-kerning="false" style:font-name-asian="Times New Roman1" style:font-weight-asian="bold" style:language-complex="ar" style:country-complex="SA" style:font-weight-complex="bold"/>
    </style:style>
    <style:style style:name="P43" style:family="paragraph" style:parent-style-name="Standard">
      <style:paragraph-properties fo:margin-top="0cm" fo:margin-bottom="0cm" style:contextual-spacing="false" fo:line-height="150%" fo:orphans="2" fo:widows="2"/>
      <style:text-properties fo:font-weight="bold" style:letter-kerning="false" style:font-name-asian="Times New Roman1" style:font-weight-asian="bold" style:language-complex="ar" style:country-complex="SA" style:font-weight-complex="bold"/>
    </style:style>
    <style:style style:name="P44" style:family="paragraph" style:parent-style-name="Standard">
      <style:paragraph-properties fo:margin-top="0cm" fo:margin-bottom="0cm" style:contextual-spacing="false" fo:line-height="150%" fo:orphans="2" fo:widows="2"/>
      <style:text-properties fo:language="es" fo:country="ES" fo:font-weight="bold" style:letter-kerning="false" style:font-name-asian="Times New Roman1" style:language-asian="es" style:country-asian="PE" style:font-weight-asian="bold" style:language-complex="ar" style:country-complex="SA" style:font-weight-complex="bold"/>
    </style:style>
    <style:style style:name="P45" style:family="paragraph" style:parent-style-name="Standard">
      <style:paragraph-properties fo:margin-top="0cm" fo:margin-bottom="0cm" style:contextual-spacing="false" fo:line-height="150%" fo:orphans="2" fo:widows="2"/>
      <style:text-properties fo:language="es" fo:country="ES" fo:font-weight="bold" style:letter-kerning="false" style:font-name-asian="Times New Roman1" style:font-weight-asian="bold" style:language-complex="ar" style:country-complex="SA" style:font-weight-complex="bold"/>
    </style:style>
    <style:style style:name="P46"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47"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48"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49"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complex="ar" style:country-complex="SA"/>
    </style:style>
    <style:style style:name="P50"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complex="ar" style:country-complex="SA"/>
    </style:style>
    <style:style style:name="P51"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ES" style:language-complex="ar" style:country-complex="SA"/>
    </style:style>
    <style:style style:name="P52" style:family="paragraph" style:parent-style-name="Standard">
      <style:paragraph-properties fo:margin-top="0cm" fo:margin-bottom="0cm" style:contextual-spacing="false" fo:line-height="150%" fo:text-align="center" style:justify-single-word="false" fo:orphans="2" fo:widows="2"/>
      <style:text-properties fo:language="es" fo:country="ES" style:letter-kerning="false" style:font-name-asian="Times New Roman1" style:language-asian="es" style:country-asian="ES" style:language-complex="ar" style:country-complex="SA"/>
    </style:style>
    <style:style style:name="P53"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asian="es" style:country-asian="PE" style:language-complex="ar" style:country-complex="SA"/>
    </style:style>
    <style:style style:name="P54"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55"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56"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57" style:family="paragraph" style:parent-style-name="Standard">
      <style:paragraph-properties fo:margin-top="0cm" fo:margin-bottom="0cm" style:contextual-spacing="false" fo:line-height="150%" fo:orphans="2" fo:widows="2" fo:text-indent="0cm" style:auto-text-indent="false"/>
      <style:text-properties fo:language="es" fo:country="ES" style:letter-kerning="false" style:font-name-asian="Calibri1" style:language-complex="ar" style:country-complex="SA"/>
    </style:style>
    <style:style style:name="P58" style:family="paragraph" style:parent-style-name="Contents_20_1">
      <style:paragraph-properties>
        <style:tab-stops>
          <style:tab-stop style:position="14.982cm" style:type="right" style:leader-style="dotted" style:leader-text="."/>
        </style:tab-stops>
      </style:paragraph-properties>
    </style:style>
    <style:style style:name="P59" style:family="paragraph" style:parent-style-name="Contents_20_1">
      <style:paragraph-properties>
        <style:tab-stops>
          <style:tab-stop style:position="2.328cm"/>
          <style:tab-stop style:position="14.982cm" style:type="right" style:leader-style="dotted" style:leader-text="."/>
        </style:tab-stops>
      </style:paragraph-properties>
    </style:style>
    <style:style style:name="P60" style:family="paragraph" style:parent-style-name="Contents_20_1">
      <style:paragraph-properties>
        <style:tab-stops>
          <style:tab-stop style:position="1.94cm"/>
          <style:tab-stop style:position="14.982cm" style:type="right" style:leader-style="dotted" style:leader-text="."/>
        </style:tab-stops>
      </style:paragraph-properties>
    </style:style>
    <style:style style:name="P61" style:family="paragraph" style:parent-style-name="Contents_20_1">
      <style:paragraph-properties fo:line-height="150%"/>
      <style:text-properties fo:language="es" fo:country="ES" style:font-name-asian="Calibri1" style:font-name-complex="Arial1"/>
    </style:style>
    <style:style style:name="P62" style:family="paragraph" style:parent-style-name="Contents_20_2">
      <style:paragraph-properties>
        <style:tab-stops>
          <style:tab-stop style:position="2.716cm"/>
          <style:tab-stop style:position="14.982cm" style:type="right" style:leader-style="dotted" style:leader-text="."/>
        </style:tab-stops>
      </style:paragraph-properties>
    </style:style>
    <style:style style:name="P63" style:family="paragraph" style:parent-style-name="Contents_20_2">
      <style:paragraph-properties>
        <style:tab-stops>
          <style:tab-stop style:position="14.982cm" style:type="right" style:leader-style="dotted" style:leader-text="."/>
        </style:tab-stops>
      </style:paragraph-properties>
    </style:style>
    <style:style style:name="P64" style:family="paragraph" style:parent-style-name="Contents_20_3">
      <style:paragraph-properties>
        <style:tab-stops>
          <style:tab-stop style:position="3.351cm"/>
          <style:tab-stop style:position="14.982cm" style:type="right" style:leader-style="dotted" style:leader-text="."/>
        </style:tab-stops>
      </style:paragraph-properties>
    </style:style>
    <style:style style:name="P65" style:family="paragraph" style:parent-style-name="Contents_20_3">
      <style:paragraph-properties>
        <style:tab-stops>
          <style:tab-stop style:position="14.982cm" style:type="right" style:leader-style="dotted" style:leader-text="."/>
        </style:tab-stops>
      </style:paragraph-properties>
    </style:style>
    <style:style style:name="P66" style:family="paragraph" style:parent-style-name="Figure_20_Index_20_1">
      <style:paragraph-properties>
        <style:tab-stops>
          <style:tab-stop style:position="14.982cm" style:type="right" style:leader-style="dotted" style:leader-text="."/>
        </style:tab-stops>
      </style:paragraph-properties>
    </style:style>
    <style:style style:name="P67" style:family="paragraph" style:parent-style-name="APA_20_Párrafo" style:list-style-name="WWNum2">
      <style:paragraph-properties fo:line-height="150%"/>
    </style:style>
    <style:style style:name="P68" style:family="paragraph" style:parent-style-name="Heading_20_1">
      <style:paragraph-properties fo:line-height="150%"/>
    </style:style>
    <style:style style:name="P69" style:family="paragraph" style:parent-style-name="Heading_20_1">
      <style:paragraph-properties fo:line-height="150%"/>
    </style:style>
    <style:style style:name="P70" style:family="paragraph" style:parent-style-name="Heading_20_1" style:list-style-name="WWNum17">
      <style:paragraph-properties fo:line-height="150%"/>
    </style:style>
    <style:style style:name="P71" style:family="paragraph" style:parent-style-name="Heading_20_1" style:list-style-name="WWNum17" style:master-page-name="Converted2">
      <style:paragraph-properties fo:line-height="150%" style:page-number="auto"/>
    </style:style>
    <style:style style:name="P72" style:family="paragraph" style:parent-style-name="Heading_20_1">
      <style:paragraph-properties fo:margin-top="0cm" fo:margin-bottom="0cm" style:contextual-spacing="false" fo:line-height="150%" fo:break-before="page"/>
    </style:style>
    <style:style style:name="P73" style:family="paragraph" style:parent-style-name="Heading_20_1" style:list-style-name="WWNum17"/>
    <style:style style:name="P74" style:family="paragraph" style:parent-style-name="Heading_20_2" style:list-style-name="WWNum17">
      <style:paragraph-properties fo:line-height="150%"/>
    </style:style>
    <style:style style:name="P75" style:family="paragraph" style:parent-style-name="Heading_20_2" style:list-style-name="WWNum17">
      <style:paragraph-properties fo:margin-left="1.016cm" fo:line-height="150%" fo:text-indent="-0.635cm" style:auto-text-indent="false"/>
    </style:style>
    <style:style style:name="P76" style:family="paragraph" style:parent-style-name="Heading_20_2" style:list-style-name="WWNum17" style:master-page-name="Converted1">
      <style:paragraph-properties fo:line-height="150%" style:page-number="auto"/>
    </style:style>
    <style:style style:name="P77" style:family="paragraph" style:parent-style-name="Heading_20_2" style:list-style-name="WWNum17">
      <style:paragraph-properties fo:margin-left="1.27cm" fo:line-height="150%" fo:text-indent="-0.635cm" style:auto-text-indent="false">
        <style:tab-stops>
          <style:tab-stop style:position="0cm"/>
        </style:tab-stops>
      </style:paragraph-properties>
    </style:style>
    <style:style style:name="P78" style:family="paragraph" style:parent-style-name="Heading_20_2" style:list-style-name="">
      <style:paragraph-properties fo:margin-left="1.016cm" fo:line-height="150%" fo:text-indent="-1.016cm" style:auto-text-indent="false"/>
    </style:style>
    <style:style style:name="P79" style:family="paragraph" style:parent-style-name="Heading_20_2" style:list-style-name="">
      <style:paragraph-properties fo:margin-left="1.016cm" fo:margin-top="0cm" fo:margin-bottom="0cm" style:contextual-spacing="false" fo:line-height="150%" fo:text-indent="-1.016cm" style:auto-text-indent="false" fo:break-before="page"/>
    </style:style>
    <style:style style:name="P80" style:family="paragraph" style:parent-style-name="Heading_20_2" style:list-style-name="">
      <style:paragraph-properties fo:margin-left="0.635cm" fo:line-height="150%" fo:text-indent="0cm" style:auto-text-indent="false"/>
    </style:style>
    <style:style style:name="P81" style:family="paragraph" style:parent-style-name="Heading_20_2" style:list-style-name="">
      <style:paragraph-properties fo:margin-left="1.016cm" fo:line-height="150%" fo:text-indent="0cm" style:auto-text-indent="false"/>
    </style:style>
    <style:style style:name="P82" style:family="paragraph" style:parent-style-name="Heading_20_2" style:list-style-name="" style:master-page-name="Converted6">
      <style:paragraph-properties fo:margin-left="0cm" fo:line-height="150%" fo:text-indent="0cm" style:auto-text-indent="false" style:page-number="auto"/>
    </style:style>
    <style:style style:name="P83" style:family="paragraph" style:parent-style-name="Heading_20_2" style:list-style-name="WWNum17"/>
    <style:style style:name="P84" style:family="paragraph" style:parent-style-name="Heading_20_3" style:list-style-name="WWNum17">
      <style:paragraph-properties fo:margin-left="2.54cm" fo:line-height="150%" fo:text-indent="1.27cm" style:auto-text-indent="false"/>
    </style:style>
    <style:style style:name="P85" style:family="paragraph" style:parent-style-name="Heading_20_3" style:list-style-name="">
      <style:paragraph-properties fo:margin-left="2.54cm" fo:line-height="150%" fo:text-indent="-1.27cm" style:auto-text-indent="false"/>
    </style:style>
    <style:style style:name="P86" style:family="paragraph" style:parent-style-name="Heading_20_3" style:list-style-name="WWNum17">
      <style:paragraph-properties fo:margin-left="1.27cm" fo:text-indent="1.27cm" style:auto-text-indent="false">
        <style:tab-stops/>
      </style:paragraph-properties>
    </style:style>
    <style:style style:name="P87" style:family="paragraph" style:parent-style-name="Heading_20_3" style:list-style-name="">
      <style:paragraph-properties fo:margin-left="2.54cm" fo:text-indent="-1.27cm" style:auto-text-indent="false"/>
    </style:style>
    <style:style style:name="P88" style:family="paragraph" style:parent-style-name="Heading_20_4" style:list-style-name="WWNum17">
      <style:paragraph-properties fo:margin-left="1.905cm" fo:line-height="150%" fo:text-indent="0cm" style:auto-text-indent="false"/>
    </style:style>
    <style:style style:name="P89" style:family="paragraph" style:parent-style-name="List_20_Paragraph" style:list-style-name="WWNum16">
      <style:paragraph-properties fo:line-height="150%"/>
    </style:style>
    <style:style style:name="P90" style:family="paragraph" style:parent-style-name="List_20_Paragraph" style:list-style-name="WWNum3">
      <style:paragraph-properties fo:line-height="150%"/>
    </style:style>
    <style:style style:name="P91" style:family="paragraph" style:parent-style-name="List_20_Paragraph" style:list-style-name="WWNum4">
      <style:paragraph-properties fo:line-height="150%"/>
    </style:style>
    <style:style style:name="P92" style:family="paragraph" style:parent-style-name="List_20_Paragraph" style:list-style-name="WWNum6">
      <style:paragraph-properties fo:line-height="150%"/>
    </style:style>
    <style:style style:name="P93" style:family="paragraph" style:parent-style-name="List_20_Paragraph" style:list-style-name="WWNum7">
      <style:paragraph-properties fo:line-height="150%"/>
    </style:style>
    <style:style style:name="P94" style:family="paragraph" style:parent-style-name="List_20_Paragraph" style:list-style-name="WWNum9">
      <style:paragraph-properties fo:line-height="150%"/>
    </style:style>
    <style:style style:name="P95" style:family="paragraph" style:parent-style-name="List_20_Paragraph" style:list-style-name="WWNum11">
      <style:paragraph-properties fo:line-height="150%"/>
    </style:style>
    <style:style style:name="P96" style:family="paragraph" style:parent-style-name="List_20_Paragraph" style:list-style-name="WWNum8">
      <style:paragraph-properties fo:line-height="150%"/>
    </style:style>
    <style:style style:name="P97" style:family="paragraph" style:parent-style-name="List_20_Paragraph" style:list-style-name="WWNum10">
      <style:paragraph-properties fo:line-height="150%"/>
    </style:style>
    <style:style style:name="P98" style:family="paragraph" style:parent-style-name="List_20_Paragraph" style:list-style-name="WWNum13">
      <style:paragraph-properties fo:line-height="150%"/>
    </style:style>
    <style:style style:name="P99" style:family="paragraph" style:parent-style-name="List_20_Paragraph">
      <style:paragraph-properties fo:line-height="150%"/>
    </style:style>
    <style:style style:name="P100" style:family="paragraph" style:parent-style-name="List_20_Paragraph" style:list-style-name="WWNum14">
      <style:paragraph-properties fo:margin-top="0cm" fo:margin-bottom="0cm" style:contextual-spacing="true" fo:line-height="150%" fo:orphans="2" fo:widows="2"/>
      <style:text-properties style:letter-kerning="false" style:font-name-asian="Times New Roman1" style:language-complex="ar" style:country-complex="SA"/>
    </style:style>
    <style:style style:name="P101" style:family="paragraph" style:parent-style-name="List_20_Paragraph" style:list-style-name="WWNum18">
      <style:paragraph-properties fo:margin-top="0cm" fo:margin-bottom="0cm" style:contextual-spacing="true" fo:line-height="150%" fo:orphans="2" fo:widows="2"/>
      <style:text-properties style:letter-kerning="false" style:font-name-asian="Times New Roman1" style:language-complex="ar" style:country-complex="SA"/>
    </style:style>
    <style:style style:name="P102" style:family="paragraph" style:parent-style-name="List_20_Paragraph" style:list-style-name="WWNum15">
      <style:paragraph-properties fo:margin-top="0cm" fo:margin-bottom="0cm" style:contextual-spacing="true" fo:line-height="150%" fo:orphans="2" fo:widows="2"/>
      <style:text-properties style:letter-kerning="false" style:font-name-asian="Times New Roman1" style:language-complex="ar" style:country-complex="SA"/>
    </style:style>
    <style:style style:name="P103" style:family="paragraph" style:parent-style-name="List_20_Paragraph" style:list-style-name="WWNum15">
      <style:paragraph-properties fo:margin-top="0cm" fo:margin-bottom="0cm" style:contextual-spacing="true" fo:line-height="150%" fo:orphans="2" fo:widows="2"/>
      <style:text-properties style:letter-kerning="false" style:font-name-asian="Times New Roman1" style:language-complex="ar" style:country-complex="SA"/>
    </style:style>
    <style:style style:name="P104" style:family="paragraph" style:parent-style-name="List_20_Paragraph" style:list-style-name="WWNum6">
      <style:paragraph-properties fo:margin-top="0cm" fo:margin-bottom="0cm" style:contextual-spacing="true" fo:line-height="150%" fo:orphans="2" fo:widows="2"/>
      <style:text-properties style:letter-kerning="false" style:font-name-asian="Calibri1" style:language-complex="ar" style:country-complex="SA"/>
    </style:style>
    <style:style style:name="P105" style:family="paragraph" style:parent-style-name="List_20_Paragraph" style:list-style-name="WWNum5">
      <style:paragraph-properties fo:margin-top="0cm" fo:margin-bottom="0cm" style:contextual-spacing="true" fo:line-height="150%" fo:orphans="2" fo:widows="2"/>
      <style:text-properties style:letter-kerning="false" style:font-name-asian="Calibri1" style:language-complex="ar" style:country-complex="SA"/>
    </style:style>
    <style:style style:name="P106" style:family="paragraph" style:parent-style-name="List_20_Paragraph" style:list-style-name="WWNum5">
      <style:paragraph-properties fo:margin-top="0cm" fo:margin-bottom="0cm" style:contextual-spacing="true" fo:line-height="150%" fo:orphans="2" fo:widows="2"/>
      <style:text-properties style:letter-kerning="false" style:font-name-asian="Calibri1" style:language-complex="ar" style:country-complex="SA"/>
    </style:style>
    <style:style style:name="P107" style:family="paragraph" style:parent-style-name="List_20_Paragraph" style:list-style-name="WWNum19"/>
    <style:style style:name="P108" style:family="paragraph" style:parent-style-name="Notas_20_APA">
      <style:paragraph-properties fo:margin-left="2.501cm" fo:text-indent="0cm" style:auto-text-indent="false"/>
    </style:style>
    <style:style style:name="P109" style:family="paragraph" style:parent-style-name="Notas_20_APA">
      <style:paragraph-properties fo:line-height="150%"/>
    </style:style>
    <style:style style:name="P110" style:family="paragraph" style:parent-style-name="Notas_20_APA">
      <style:paragraph-properties fo:line-height="150%"/>
      <style:text-properties fo:language="es" fo:country="MX"/>
    </style:style>
    <style:style style:name="P111" style:family="paragraph" style:parent-style-name="Notas_20_APA">
      <style:paragraph-properties fo:line-height="150%"/>
      <style:text-properties fo:language="es" fo:country="ES"/>
    </style:style>
    <style:style style:name="P112" style:family="paragraph" style:parent-style-name="Notas_20_APA" style:master-page-name="Converted4">
      <style:paragraph-properties fo:margin-left="0cm" fo:line-height="150%" fo:text-indent="0cm" style:auto-text-indent="false" style:page-number="auto"/>
      <style:text-properties fo:language="es" fo:country="ES"/>
    </style:style>
    <style:style style:name="P113" style:family="paragraph" style:parent-style-name="Notas_20_APA">
      <style:paragraph-properties fo:line-height="150%"/>
      <style:text-properties fo:font-size="12pt" fo:language="es" fo:country="ES" fo:font-style="italic" style:font-name-asian="Calibri1" style:font-size-asian="12pt" style:font-style-asian="italic" style:font-name-complex="Arial1" style:font-style-complex="italic"/>
    </style:style>
    <style:style style:name="P114" style:family="paragraph" style:parent-style-name="Standard">
      <style:paragraph-properties fo:line-height="150%" fo:text-align="center" style:justify-single-word="false"/>
    </style:style>
    <style:style style:name="P115" style:family="paragraph" style:parent-style-name="Standard" style:master-page-name="Standard">
      <style:paragraph-properties fo:line-height="150%" fo:text-align="center" style:justify-single-word="false" style:page-number="1"/>
    </style:style>
    <style:style style:name="P116" style:family="paragraph" style:parent-style-name="Standard">
      <style:paragraph-properties fo:line-height="150%"/>
    </style:style>
    <style:style style:name="P117" style:family="paragraph" style:parent-style-name="Standard">
      <style:paragraph-properties fo:line-height="150%"/>
    </style:style>
    <style:style style:name="P118" style:family="paragraph" style:parent-style-name="Standard">
      <style:paragraph-properties fo:line-height="150%" fo:text-indent="0cm" style:auto-text-indent="false"/>
    </style:style>
    <style:style style:name="P119" style:family="paragraph" style:parent-style-name="Standard">
      <style:paragraph-properties fo:margin-top="0cm" fo:margin-bottom="0.282cm" style:contextual-spacing="false" fo:line-height="150%" fo:text-indent="0cm" style:auto-text-indent="false"/>
    </style:style>
    <style:style style:name="P120" style:family="paragraph" style:parent-style-name="Standard">
      <style:paragraph-properties fo:margin-left="1.27cm" fo:line-height="150%" fo:text-indent="0cm" style:auto-text-indent="false"/>
    </style:style>
    <style:style style:name="P121" style:family="paragraph" style:parent-style-name="Standard" style:list-style-name="WWNum23">
      <style:paragraph-properties fo:line-height="15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22">
      <style:paragraph-properties fo:line-height="15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line-height="150%" fo:text-align="start" style:justify-single-word="false"/>
    </style:style>
    <style:style style:name="P124" style:family="paragraph" style:parent-style-name="Standard">
      <style:paragraph-properties fo:margin-left="1.524cm" fo:line-height="150%" fo:keep-together="always" fo:text-indent="-1.524cm" style:auto-text-indent="false" fo:keep-with-next="always"/>
    </style:style>
    <style:style style:name="P125" style:family="paragraph" style:parent-style-name="Standard">
      <style:paragraph-properties fo:margin-left="-1.111cm" fo:line-height="150%" fo:text-indent="2.381cm" style:auto-text-indent="false" fo:padding="0cm" fo:border="none" style:shadow="none" style:join-border="false"/>
    </style:style>
    <style:style style:name="P126" style:family="paragraph" style:parent-style-name="Standard">
      <style:paragraph-properties fo:line-height="150%" fo:text-indent="0cm" style:auto-text-indent="false">
        <style:tab-stops>
          <style:tab-stop style:position="10.61cm"/>
        </style:tab-stops>
      </style:paragraph-properties>
    </style:style>
    <style:style style:name="P127" style:family="paragraph" style:parent-style-name="Standard" style:master-page-name="Converted8">
      <style:paragraph-properties fo:line-height="150%" style:page-number="auto"/>
    </style:style>
    <style:style style:name="P128" style:family="paragraph" style:parent-style-name="Standard">
      <style:paragraph-properties fo:line-height="150%" fo:text-align="center" style:justify-single-word="false"/>
      <style:text-properties style:font-name-asian="ArialMT"/>
    </style:style>
    <style:style style:name="P129" style:family="paragraph" style:parent-style-name="Standard">
      <style:paragraph-properties fo:line-height="150%" fo:text-align="center" style:justify-single-word="false"/>
      <style:text-properties style:font-name-asian="Arial-ItalicMT"/>
    </style:style>
    <style:style style:name="P130" style:family="paragraph" style:parent-style-name="Standard">
      <style:paragraph-properties fo:line-height="150%" fo:text-align="center" style:justify-single-word="false"/>
      <style:text-properties fo:language="es" fo:country="ES" style:font-name-asian="ArialMT"/>
    </style:style>
    <style:style style:name="P131" style:family="paragraph" style:parent-style-name="Standard">
      <style:paragraph-properties fo:line-height="150%"/>
      <style:text-properties fo:language="es" fo:country="ES"/>
    </style:style>
    <style:style style:name="P132" style:family="paragraph" style:parent-style-name="Standard">
      <style:paragraph-properties fo:line-height="150%" fo:text-indent="0cm" style:auto-text-indent="false"/>
      <style:text-properties fo:language="es" fo:country="ES"/>
    </style:style>
    <style:style style:name="P133" style:family="paragraph" style:parent-style-name="Standard">
      <style:paragraph-properties fo:line-height="150%"/>
      <style:text-properties fo:language="es" fo:country="ES" style:language-asian="es" style:country-asian="ES"/>
    </style:style>
    <style:style style:name="P134" style:family="paragraph" style:parent-style-name="Standard">
      <style:paragraph-properties fo:line-height="150%"/>
      <style:text-properties fo:language="es" fo:country="ES" style:font-name-asian="游ゴシック Light" style:font-name-complex="Times New Roman1"/>
    </style:style>
    <style:style style:name="P135" style:family="paragraph" style:parent-style-name="Standard">
      <style:paragraph-properties fo:margin-top="0cm" fo:margin-bottom="0cm" style:contextual-spacing="false" fo:line-height="150%" fo:orphans="2" fo:widows="2"/>
      <style:text-properties fo:language="es" fo:country="ES" fo:font-weight="bold" style:letter-kerning="false" style:font-name-asian="Times New Roman1" style:language-asian="es" style:country-asian="PE" style:font-weight-asian="bold" style:language-complex="ar" style:country-complex="SA" style:font-weight-complex="bold"/>
    </style:style>
    <style:style style:name="P136" style:family="paragraph" style:parent-style-name="Standard">
      <style:paragraph-properties fo:margin-top="0cm" fo:margin-bottom="0cm" style:contextual-spacing="false" fo:line-height="150%" fo:orphans="2" fo:widows="2"/>
      <style:text-properties fo:language="es" fo:country="ES" fo:font-weight="bold" style:letter-kerning="false" style:font-name-asian="Times New Roman1" style:font-weight-asian="bold" style:language-complex="ar" style:country-complex="SA" style:font-weight-complex="bold"/>
    </style:style>
    <style:style style:name="P137"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138"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139"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PE" style:language-complex="ar" style:country-complex="SA"/>
    </style:style>
    <style:style style:name="P140"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complex="ar" style:country-complex="SA"/>
    </style:style>
    <style:style style:name="P141"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complex="ar" style:country-complex="SA"/>
    </style:style>
    <style:style style:name="P142" style:family="paragraph" style:parent-style-name="Standard">
      <style:paragraph-properties fo:margin-top="0cm" fo:margin-bottom="0cm" style:contextual-spacing="false" fo:line-height="150%" fo:orphans="2" fo:widows="2"/>
      <style:text-properties fo:language="es" fo:country="ES" style:letter-kerning="false" style:font-name-asian="Times New Roman1" style:language-asian="es" style:country-asian="ES" style:language-complex="ar" style:country-complex="SA"/>
    </style:style>
    <style:style style:name="P143" style:family="paragraph" style:parent-style-name="Standard">
      <style:paragraph-properties fo:margin-top="0cm" fo:margin-bottom="0cm" style:contextual-spacing="false" fo:line-height="150%" fo:text-align="center" style:justify-single-word="false" fo:orphans="2" fo:widows="2"/>
      <style:text-properties fo:language="es" fo:country="ES" style:letter-kerning="false" style:font-name-asian="Times New Roman1" style:language-asian="es" style:country-asian="ES" style:language-complex="ar" style:country-complex="SA"/>
    </style:style>
    <style:style style:name="P144"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asian="es" style:country-asian="PE" style:language-complex="ar" style:country-complex="SA"/>
    </style:style>
    <style:style style:name="P145"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146"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147" style:family="paragraph" style:parent-style-name="Standard">
      <style:paragraph-properties fo:margin-top="0cm" fo:margin-bottom="0cm" style:contextual-spacing="false" fo:line-height="150%" fo:orphans="2" fo:widows="2"/>
      <style:text-properties fo:language="es" fo:country="ES" style:letter-kerning="false" style:font-name-asian="Calibri1" style:language-complex="ar" style:country-complex="SA"/>
    </style:style>
    <style:style style:name="P148" style:family="paragraph" style:parent-style-name="Standard">
      <style:paragraph-properties fo:margin-top="0cm" fo:margin-bottom="0cm" style:contextual-spacing="false" fo:line-height="150%" fo:orphans="2" fo:widows="2" fo:text-indent="0cm" style:auto-text-indent="false"/>
      <style:text-properties fo:language="es" fo:country="ES" style:letter-kerning="false" style:font-name-asian="Calibri1" style:language-complex="ar" style:country-complex="SA"/>
    </style:style>
    <style:style style:name="P149" style:family="paragraph" style:parent-style-name="Standard">
      <style:paragraph-properties fo:line-height="150%"/>
      <style:text-properties fo:language="es" fo:country="ES" style:font-name-asian="Calibri1"/>
    </style:style>
    <style:style style:name="P150" style:family="paragraph" style:parent-style-name="Standard">
      <style:paragraph-properties fo:line-height="150%" fo:text-indent="0cm" style:auto-text-indent="false"/>
      <style:text-properties fo:language="es" fo:country="ES" style:font-name-asian="Calibri1"/>
    </style:style>
    <style:style style:name="P151"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152"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153"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154"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155"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156" style:family="paragraph" style:parent-style-name="Standard">
      <style:paragraph-properties fo:margin-top="0cm" fo:margin-bottom="0cm" style:contextual-spacing="false" fo:line-height="150%" fo:orphans="2" fo:widows="2" fo:text-indent="0cm" style:auto-text-indent="false"/>
      <style:text-properties style:letter-kerning="false" style:font-name-asian="Times New Roman1" style:language-complex="ar" style:country-complex="SA"/>
    </style:style>
    <style:style style:name="P157" style:family="paragraph" style:parent-style-name="Standard">
      <style:paragraph-properties fo:margin-top="0cm" fo:margin-bottom="0cm" style:contextual-spacing="false" fo:line-height="150%" fo:orphans="2" fo:widows="2"/>
      <style:text-properties style:letter-kerning="false" style:font-name-asian="Times New Roman1" style:language-complex="ar" style:country-complex="SA"/>
    </style:style>
    <style:style style:name="P158"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Times New Roman1" style:language-complex="ar" style:country-complex="SA"/>
    </style:style>
    <style:style style:name="P159"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160"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161"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162"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163" style:family="paragraph" style:parent-style-name="Standard">
      <style:paragraph-properties fo:margin-top="0cm" fo:margin-bottom="0cm" style:contextual-spacing="false" fo:line-height="150%" fo:orphans="2" fo:widows="2"/>
      <style:text-properties style:letter-kerning="false" style:font-name-asian="Calibri1" style:language-complex="ar" style:country-complex="SA"/>
    </style:style>
    <style:style style:name="P164" style:family="paragraph" style:parent-style-name="Standard">
      <style:paragraph-properties fo:margin-top="0cm" fo:margin-bottom="0cm" style:contextual-spacing="false" fo:line-height="150%" fo:orphans="2" fo:widows="2" fo:text-indent="0cm" style:auto-text-indent="false"/>
      <style:text-properties style:letter-kerning="false" style:font-name-asian="Calibri1" style:language-complex="ar" style:country-complex="SA"/>
    </style:style>
    <style:style style:name="P165"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166"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167"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168"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169"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style:letter-kerning="false" style:font-name-asian="Calibri1" style:language-complex="ar" style:country-complex="SA"/>
    </style:style>
    <style:style style:name="P170" style:family="paragraph" style:parent-style-name="Standard">
      <style:paragraph-properties fo:margin-top="0cm" fo:margin-bottom="0cm" style:contextual-spacing="false" fo:line-height="150%" fo:text-align="center" style:justify-single-word="false" fo:orphans="2" fo:widows="2"/>
      <style:text-properties style:letter-kerning="false" style:font-name-asian="Calibri1" style:language-complex="ar" style:country-complex="SA"/>
    </style:style>
    <style:style style:name="P171" style:family="paragraph" style:parent-style-name="Standard">
      <style:paragraph-properties fo:margin-top="0cm" fo:margin-bottom="0cm" style:contextual-spacing="false" fo:orphans="2" fo:widows="2"/>
      <style:text-properties style:letter-kerning="false" style:font-name-asian="Calibri1" style:language-complex="ar" style:country-complex="SA"/>
    </style:style>
    <style:style style:name="P172" style:family="paragraph" style:parent-style-name="Standard">
      <style:paragraph-properties fo:text-indent="0cm" style:auto-text-indent="false">
        <style:tab-stops>
          <style:tab-stop style:position="10.61cm"/>
        </style:tab-stops>
      </style:paragraph-properties>
      <style:text-properties fo:font-size="11pt" style:font-size-asian="11pt" style:font-size-complex="11pt"/>
    </style:style>
    <style:style style:name="P173" style:family="paragraph" style:parent-style-name="Standard">
      <style:paragraph-properties fo:text-align="end" style:justify-single-word="false" fo:text-indent="0cm" style:auto-text-indent="false"/>
      <style:text-properties fo:font-size="11pt" style:font-size-asian="11pt" style:font-size-complex="11pt"/>
    </style:style>
    <style:style style:name="P174" style:family="paragraph" style:parent-style-name="Standard">
      <style:paragraph-properties fo:text-align="start" style:justify-single-word="false" fo:text-indent="0cm" style:auto-text-indent="false"/>
      <style:text-properties fo:font-size="11pt" style:font-size-asian="11pt" style:font-size-complex="11pt"/>
    </style:style>
    <style:style style:name="P175" style:family="paragraph" style:parent-style-name="Standard">
      <style:paragraph-properties fo:text-indent="0cm" style:auto-text-indent="false"/>
      <style:text-properties fo:font-size="11pt" style:font-size-asian="11pt" style:font-size-complex="11pt"/>
    </style:style>
    <style:style style:name="P176" style:family="paragraph" style:parent-style-name="Standard">
      <style:paragraph-properties fo:margin-top="0cm" fo:margin-bottom="0cm" style:contextual-spacing="false" fo:line-height="150%" fo:orphans="2" fo:widows="2"/>
      <style:text-properties fo:font-size="11pt" style:letter-kerning="false" style:font-name-asian="Calibri1" style:font-size-asian="11pt" style:font-size-complex="11pt" style:language-complex="ar" style:country-complex="SA"/>
    </style:style>
    <style:style style:name="P177"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name-asian="Calibri1" style:font-size-asian="11pt" style:font-size-complex="11pt" style:language-complex="ar" style:country-complex="SA"/>
    </style:style>
    <style:style style:name="P178" style:family="paragraph" style:parent-style-name="Standard">
      <style:paragraph-properties fo:margin-top="0cm" fo:margin-bottom="0cm" style:contextual-spacing="false" fo:line-height="150%" fo:orphans="2" fo:widows="2"/>
      <style:text-properties fo:font-size="11pt" style:letter-kerning="false" style:font-name-asian="Times New Roman1" style:font-size-asian="11pt" style:font-size-complex="11pt" style:language-complex="ar" style:country-complex="SA"/>
    </style:style>
    <style:style style:name="P179" style:family="paragraph" style:parent-style-name="Standard">
      <style:paragraph-properties fo:margin-top="0cm" fo:margin-bottom="0cm" style:contextual-spacing="false" fo:line-height="150%" fo:orphans="2" fo:widows="2"/>
      <style:text-properties fo:font-size="11pt" fo:font-weight="bold" style:letter-kerning="false" style:font-name-asian="Calibri1" style:font-size-asian="11pt" style:font-weight-asian="bold" style:font-size-complex="11pt" style:language-complex="ar" style:country-complex="SA" style:font-weight-complex="bold"/>
    </style:style>
    <style:style style:name="P180" style:family="paragraph" style:parent-style-name="Standard">
      <style:paragraph-properties fo:margin-top="0cm" fo:margin-bottom="0cm" style:contextual-spacing="false" fo:line-height="150%" fo:text-align="center" style:justify-single-word="false"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181"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182"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language-asian="es" style:country-asian="PE" style:font-size-complex="11pt" style:language-complex="ar" style:country-complex="SA"/>
    </style:style>
    <style:style style:name="P183" style:family="paragraph" style:parent-style-name="Standard">
      <style:paragraph-properties fo:margin-top="0cm" fo:margin-bottom="0cm" style:contextual-spacing="false" fo:line-height="150%" fo:orphans="2" fo:widows="2" fo:text-indent="0cm" style:auto-text-indent="false"/>
      <style:text-properties fo:font-size="11pt" fo:language="es" fo:country="ES" style:letter-kerning="false" style:font-name-asian="Calibri1" style:font-size-asian="11pt" style:language-asian="es" style:country-asian="PE" style:font-size-complex="11pt" style:language-complex="ar" style:country-complex="SA"/>
    </style:style>
    <style:style style:name="P184"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font-size-complex="11pt" style:language-complex="ar" style:country-complex="SA"/>
    </style:style>
    <style:style style:name="P185" style:family="paragraph" style:parent-style-name="Standard">
      <style:paragraph-properties fo:margin-top="0cm" fo:margin-bottom="0cm" style:contextual-spacing="false" fo:line-height="150%" fo:orphans="2" fo:widows="2"/>
      <style:text-properties fo:font-size="11pt" fo:language="es" fo:country="ES" style:letter-kerning="false" style:font-name-asian="Calibri1" style:font-size-asian="11pt" style:font-size-complex="11pt" style:language-complex="ar" style:country-complex="SA"/>
    </style:style>
    <style:style style:name="P186" style:family="paragraph" style:parent-style-name="Standard">
      <style:paragraph-properties fo:margin-top="0cm" fo:margin-bottom="0cm" style:contextual-spacing="false" fo:line-height="150%" fo:orphans="2" fo:widows="2" fo:text-indent="0cm" style:auto-text-indent="false"/>
      <style:text-properties fo:font-size="11pt" fo:language="es" fo:country="ES" style:letter-kerning="false" style:font-name-asian="Times New Roman1" style:font-size-asian="11pt" style:language-asian="es" style:country-asian="PE" style:font-size-complex="11pt" style:language-complex="ar" style:country-complex="SA"/>
    </style:style>
    <style:style style:name="P187" style:family="paragraph" style:parent-style-name="Standard">
      <style:paragraph-properties fo:line-height="150%"/>
      <style:text-properties fo:background-color="#ffffff"/>
    </style:style>
    <style:style style:name="P188" style:family="paragraph" style:parent-style-name="Standard">
      <style:paragraph-properties fo:line-height="150%" fo:text-indent="0cm" style:auto-text-indent="false"/>
      <style:text-properties fo:background-color="#ffffff"/>
    </style:style>
    <style:style style:name="P189" style:family="paragraph" style:parent-style-name="Standard">
      <style:paragraph-properties fo:line-height="150%"/>
      <style:text-properties style:font-name-complex="Carlito1" fo:background-color="#ffffff"/>
    </style:style>
    <style:style style:name="P190" style:family="paragraph" style:parent-style-name="Standard">
      <style:paragraph-properties fo:margin-top="0cm" fo:margin-bottom="0cm" style:contextual-spacing="false" fo:line-height="150%" fo:orphans="2" fo:widows="2"/>
      <style:text-properties fo:font-weight="bold" style:letter-kerning="false" style:font-name-asian="Calibri1" style:font-weight-asian="bold" style:language-complex="ar" style:country-complex="SA" style:font-weight-complex="bold"/>
    </style:style>
    <style:style style:name="P191" style:family="paragraph" style:parent-style-name="Standard">
      <style:paragraph-properties fo:margin-top="0cm" fo:margin-bottom="0cm" style:contextual-spacing="false" fo:line-height="150%" fo:orphans="2" fo:widows="2"/>
      <style:text-properties fo:font-weight="bold" style:letter-kerning="false" style:font-name-asian="Times New Roman1" style:font-weight-asian="bold" style:language-complex="ar" style:country-complex="SA" style:font-weight-complex="bold"/>
    </style:style>
    <style:style style:name="P192" style:family="paragraph" style:parent-style-name="Standard">
      <style:paragraph-properties fo:margin-top="0cm" fo:margin-bottom="0cm" style:contextual-spacing="false" fo:line-height="150%" fo:orphans="2" fo:widows="2"/>
      <style:text-properties fo:font-weight="bold" style:letter-kerning="false" style:font-name-asian="Times New Roman1" style:font-weight-asian="bold" style:language-complex="ar" style:country-complex="SA" style:font-weight-complex="bold"/>
    </style:style>
    <style:style style:name="P193" style:family="paragraph" style:parent-style-name="Standard">
      <style:paragraph-properties fo:line-height="100%" fo:text-indent="0cm" style:auto-text-indent="false"/>
    </style:style>
    <style:style style:name="P194" style:family="paragraph" style:parent-style-name="Standard" style:list-style-name="WWNum20">
      <style:paragraph-properties fo:line-height="100%" fo:text-align="center" style:justify-single-word="false" fo:hyphenation-ladder-count="no-limit">
        <style:tab-stops>
          <style:tab-stop style:position="10.6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WWNum21">
      <style:paragraph-properties fo:line-height="100%" fo:text-align="center" style:justify-single-word="false" fo:hyphenation-ladder-count="no-limit">
        <style:tab-stops>
          <style:tab-stop style:position="10.6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line-height="89%" fo:text-align="center" style:justify-single-word="false" fo:text-indent="0cm" style:auto-text-indent="false"/>
    </style:style>
    <style:style style:name="P197" style:family="paragraph" style:parent-style-name="Standard">
      <style:paragraph-properties fo:text-indent="0cm" style:auto-text-indent="false">
        <style:tab-stops>
          <style:tab-stop style:position="10.61cm"/>
        </style:tab-stops>
      </style:paragraph-properties>
    </style:style>
    <style:style style:name="P198" style:family="paragraph" style:parent-style-name="Standard">
      <style:paragraph-properties fo:text-indent="0cm" style:auto-text-indent="false"/>
    </style:style>
    <style:style style:name="P199" style:family="paragraph" style:parent-style-name="Standard">
      <style:paragraph-properties fo:text-align="end" style:justify-single-word="false" fo:text-indent="0cm" style:auto-text-indent="false"/>
    </style:style>
    <style:style style:name="P200" style:family="paragraph" style:parent-style-name="Standard">
      <style:paragraph-properties fo:line-height="150%"/>
      <style:text-properties fo:font-size="10pt" fo:language="es" fo:country="ES" style:font-size-asian="10pt" style:font-size-complex="10pt"/>
    </style:style>
    <style:style style:name="P201" style:family="paragraph" style:parent-style-name="Standard">
      <style:paragraph-properties fo:text-align="center" style:justify-single-word="false"/>
    </style:style>
    <style:style style:name="P202" style:family="paragraph" style:parent-style-name="TÍTULO_20_Tablas_20_y_20_Figuras">
      <style:paragraph-properties fo:line-height="150%"/>
    </style:style>
    <style:style style:name="P203" style:family="paragraph" style:parent-style-name="TÍTULO_20_Tablas_20_y_20_Figuras" style:master-page-name="Converted3">
      <style:paragraph-properties fo:line-height="150%" style:page-number="auto"/>
    </style:style>
    <style:style style:name="P204" style:family="paragraph" style:parent-style-name="TÍTULO_20_Tablas_20_y_20_Figuras" style:master-page-name="Converted5">
      <style:paragraph-properties fo:line-height="150%" style:page-number="auto"/>
    </style:style>
    <style:style style:name="P205" style:family="paragraph" style:parent-style-name="TÍTULO_20_Tablas_20_y_20_Figuras">
      <style:paragraph-properties fo:line-height="150%"/>
      <style:text-properties fo:language="es" fo:country="ES"/>
    </style:style>
    <style:style style:name="P206" style:family="paragraph" style:parent-style-name="TÍTULO_20_Tablas_20_y_20_Figuras">
      <style:paragraph-properties fo:line-height="150%"/>
      <style:text-properties fo:language="es" fo:country="ES" style:font-name-asian="Calibri1" style:font-name-complex="Arial1"/>
    </style:style>
    <style:style style:name="P207" style:family="paragraph" style:parent-style-name="TÍTULO_20_Tablas_20_y_20_Figuras">
      <style:paragraph-properties fo:line-height="150%"/>
      <style:text-properties fo:language="es" fo:country="ES" style:font-name-asian="Calibri1" style:font-name-complex="Arial1" style:font-size-complex="12pt" style:font-style-complex="italic"/>
    </style:style>
    <style:style style:name="P208" style:family="paragraph" style:parent-style-name="TÍTULO_20_Tablas_20_y_20_Figuras" style:master-page-name="Converted7">
      <style:paragraph-properties style:page-number="auto"/>
    </style:style>
    <style:style style:name="P209" style:family="paragraph" style:parent-style-name="Título_20_11" style:list-style-name="WWNum12">
      <style:paragraph-properties fo:margin-top="0cm" fo:margin-bottom="0cm" style:contextual-spacing="false" fo:line-height="150%" fo:orphans="2" fo:widows="2"/>
      <style:text-properties style:letter-kerning="false" style:language-complex="ar" style:country-complex="SA"/>
    </style:style>
    <style:style style:name="P210" style:family="paragraph">
      <loext:graphic-properties draw:fill="none"/>
      <style:paragraph-properties fo:text-align="start"/>
    </style:style>
    <style:style style:name="P211" style:family="paragraph">
      <loext:graphic-properties draw:fill="solid" draw:fill-color="#ffffff"/>
      <style:paragraph-properties fo:text-align="start"/>
    </style:style>
    <style:style style:name="P212" style:family="paragraph">
      <loext:graphic-properties draw:fill="solid" draw:fill-color="#ffffff"/>
      <style:paragraph-properties fo:text-align="start"/>
      <style:text-properties fo:font-size="18pt"/>
    </style:style>
    <style:style style:name="P213" style:family="paragraph">
      <loext:graphic-properties draw:fill="solid" draw:fill-color="#4472c4"/>
      <style:paragraph-properties fo:text-align="start"/>
    </style:style>
    <style:style style:name="P214" style:family="paragraph">
      <loext:graphic-properties draw:fill="none"/>
      <style:paragraph-properties fo:text-align="start"/>
      <style:text-properties fo:font-size="18pt"/>
    </style:style>
    <style:style style:name="T1" style:family="text">
      <style:text-properties style:font-name-asian="ArialMT"/>
    </style:style>
    <style:style style:name="T2" style:family="text">
      <style:text-properties style:font-name-asian="Arial-BoldMT"/>
    </style:style>
    <style:style style:name="T3" style:family="text">
      <style:text-properties style:font-name-asian="Arial-ItalicMT"/>
    </style:style>
    <style:style style:name="T4" style:family="text">
      <style:text-properties fo:language="es" fo:country="ES"/>
    </style:style>
    <style:style style:name="T5" style:family="text">
      <style:text-properties fo:language="es" fo:country="ES" style:font-name-asian="ArialMT"/>
    </style:style>
    <style:style style:name="T6" style:family="text">
      <style:text-properties fo:language="es" fo:country="ES" style:font-name-asian="游ゴシック Light"/>
    </style:style>
    <style:style style:name="T7" style:family="text">
      <style:text-properties fo:language="es" fo:country="ES" style:font-name-asian="游ゴシック Light" style:font-style-complex="italic" style:font-weight-complex="bold"/>
    </style:style>
    <style:style style:name="T8" style:family="text">
      <style:text-properties fo:language="es" fo:country="ES" style:font-name-asian="游ゴシック Light" style:font-style-complex="italic"/>
    </style:style>
    <style:style style:name="T9" style:family="text">
      <style:text-properties fo:language="es" fo:country="ES" style:font-name-asian="游ゴシック Light" style:font-name-complex="Times New Roman1"/>
    </style:style>
    <style:style style:name="T10" style:family="text">
      <style:text-properties fo:language="es" fo:country="ES" style:font-name-asian="Calibri1"/>
    </style:style>
    <style:style style:name="T11" style:family="text">
      <style:text-properties fo:language="es" fo:country="ES" style:font-name-asian="Calibri1" style:font-name-complex="Arial1"/>
    </style:style>
    <style:style style:name="T12" style:family="text">
      <style:text-properties fo:language="es" fo:country="ES" style:font-name-asian="Calibri1" style:font-name-complex="Arial1" style:font-size-complex="12pt" style:font-style-complex="italic"/>
    </style:style>
    <style:style style:name="T13" style:family="text">
      <style:text-properties fo:language="es" fo:country="ES" style:font-name-asian="Calibri1" style:language-asian="es" style:country-asian="PE"/>
    </style:style>
    <style:style style:name="T14" style:family="text">
      <style:text-properties fo:language="es" fo:country="ES" fo:font-style="normal" fo:font-weight="bold" style:font-style-asian="normal" style:font-weight-asian="bold" style:font-style-complex="italic" style:font-weight-complex="bold"/>
    </style:style>
    <style:style style:name="T15" style:family="text">
      <style:text-properties fo:language="es" fo:country="ES" fo:font-style="italic" style:font-style-asian="italic" style:font-style-complex="italic"/>
    </style:style>
    <style:style style:name="T16" style:family="text">
      <style:text-properties fo:language="es" fo:country="ES" style:language-asian="es" style:country-asian="PE"/>
    </style:style>
    <style:style style:name="T17" style:family="text">
      <style:text-properties fo:language="es" fo:country="ES" style:language-asian="es" style:country-asian="ES"/>
    </style:style>
    <style:style style:name="T18" style:family="text">
      <style:text-properties fo:language="es" fo:country="ES" fo:font-weight="bold" style:language-asian="es" style:country-asian="ES" style:font-weight-asian="bold" style:font-weight-complex="bold"/>
    </style:style>
    <style:style style:name="T19" style:family="text">
      <style:text-properties fo:language="es" fo:country="ES" fo:font-weight="bold" style:font-weight-asian="bold"/>
    </style:style>
    <style:style style:name="T20" style:family="text">
      <style:text-properties fo:language="es" fo:country="ES" fo:font-weight="bold" style:font-weight-asian="bold" style:font-style-complex="italic" style:font-weight-complex="bold"/>
    </style:style>
    <style:style style:name="T21" style:family="text">
      <style:text-properties fo:language="es" fo:country="ES" fo:font-weight="bold" style:font-name-asian="游ゴシック Light" style:font-weight-asian="bold" style:font-name-complex="Times New Roman1" style:font-size-complex="13pt"/>
    </style:style>
    <style:style style:name="T22" style:family="text">
      <style:text-properties fo:language="es" fo:country="ES" style:font-weight-complex="bold"/>
    </style:style>
    <style:style style:name="T23" style:family="text">
      <style:text-properties fo:language="es" fo:country="ES" style:font-name-asian="游明朝"/>
    </style:style>
    <style:style style:name="T24" style:family="text">
      <style:text-properties fo:language="es" fo:country="ES" style:font-style-complex="italic" style:font-weight-complex="bold"/>
    </style:style>
    <style:style style:name="T25" style:family="text">
      <style:text-properties text:display="true"/>
    </style:style>
    <style:style style:name="T26" style:family="text">
      <style:text-properties style:use-window-font-color="true" loext:opacity="0%" style:font-name="Calibri" fo:font-size="11pt" fo:language="es" fo:country="MX" style:font-name-asian="游明朝" style:font-size-asian="11pt" style:font-name-complex="Arial1" style:font-size-complex="11pt"/>
    </style:style>
    <style:style style:name="T27" style:family="text">
      <style:text-properties style:use-window-font-color="true" loext:opacity="0%" fo:font-size="11pt" fo:language="es" fo:country="MX" fo:font-weight="normal" style:font-name-asian="游明朝" style:font-size-asian="11pt" style:font-weight-asian="normal" style:font-name-complex="Arial1" style:font-size-complex="11pt" style:font-weight-complex="normal"/>
    </style:style>
    <style:style style:name="T28" style:family="text">
      <style:text-properties style:use-window-font-color="true" loext:opacity="0%" fo:font-size="10pt" fo:font-style="italic" fo:font-weight="bold" style:font-size-asian="10pt" style:font-style-asian="italic" style:font-weight-asian="bold" style:font-size-complex="10pt" style:font-style-complex="italic" style:font-weight-complex="bold"/>
    </style:style>
    <style:style style:name="T29" style:family="text">
      <style:text-properties style:use-window-font-color="true" loext:opacity="0%" fo:font-size="10pt" style:font-size-asian="10pt" style:font-size-complex="10pt"/>
    </style:style>
    <style:style style:name="T30" style:family="text">
      <style:text-properties style:font-name-asian="游ゴシック Light"/>
    </style:style>
    <style:style style:name="T31" style:family="text">
      <style:text-properties style:font-name-asian="游ゴシック Light"/>
    </style:style>
    <style:style style:name="T32" style:family="text">
      <style:text-properties style:font-name-asian="游ゴシック Light" style:font-style-complex="italic"/>
    </style:style>
    <style:style style:name="T33" style:family="text">
      <style:text-properties style:font-name="Arial" fo:language="es" fo:country="ES" style:font-name-asian="游ゴシック Light" style:font-name-complex="Arial1"/>
    </style:style>
    <style:style style:name="T34" style:family="text">
      <style:text-properties style:font-name="Arial" fo:font-size="11pt" fo:language="es" fo:country="ES" style:font-size-asian="11pt" style:font-name-complex="Arial1" style:font-size-complex="11pt"/>
    </style:style>
    <style:style style:name="T35" style:family="text">
      <style:text-properties fo:background-color="#ffffff"/>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fo:background-color="#aeaaaa" loext:char-shading-value="0" style:font-size-asian="11pt" style:font-size-complex="11pt"/>
    </style:style>
    <style:style style:name="T40" style:family="text">
      <style:text-properties fo:font-size="11pt" fo:font-style="italic" style:font-size-asian="11pt" style:font-style-asian="italic" style:font-size-complex="11pt"/>
    </style:style>
    <style:style style:name="T41" style:family="text">
      <style:text-properties fo:font-size="11pt" fo:language="es" fo:country="ES" style:font-size-asian="11pt" style:language-asian="es" style:country-asian="PE" style:font-size-complex="11pt"/>
    </style:style>
    <style:style style:name="T42" style:family="text">
      <style:text-properties fo:font-size="11pt" fo:language="es" fo:country="ES" style:font-size-asian="11pt" style:font-size-complex="11pt"/>
    </style:style>
    <style:style style:name="T43" style:family="text">
      <style:text-properties fo:font-size="11pt" fo:language="es" fo:country="ES" fo:font-weight="bold" style:font-size-asian="11pt" style:language-asian="es" style:country-asian="PE" style:font-weight-asian="bold" style:font-size-complex="11pt"/>
    </style:style>
    <style:style style:name="T44" style:family="text">
      <style:text-properties fo:font-size="11pt" fo:language="es" fo:country="ES" fo:font-weight="bold" style:font-size-asian="11pt" style:language-asian="es" style:country-asian="PE" style:font-weight-asian="bold" style:font-size-complex="11pt" style:font-weight-complex="bold"/>
    </style:style>
    <style:style style:name="T45" style:family="text">
      <style:text-properties fo:font-size="11pt" fo:language="es" fo:country="ES" fo:font-weight="bold" style:font-size-asian="11pt" style:font-weight-asian="bold"/>
    </style:style>
    <style:style style:name="T46" style:family="text">
      <style:text-properties fo:font-size="11pt" fo:language="es" fo:country="ES" style:font-name-asian="游明朝" style:font-size-asian="11pt"/>
    </style:style>
    <style:style style:name="T47" style:family="text">
      <style:text-properties fo:font-style="italic" fo:font-weight="bold" style:font-style-asian="italic" style:font-weight-asian="bold"/>
    </style:style>
    <style:style style:name="T48" style:family="text">
      <style:text-properties fo:font-style="italic" fo:font-weight="bold" style:font-style-asian="italic" style:font-weight-asian="bold" fo:background-color="#ffffff"/>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normal" fo:font-weight="bold" style:font-style-asian="normal" style:font-weight-asian="bold" style:font-style-complex="italic" style:font-weight-complex="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fo:background-color="#ffffff"/>
    </style:style>
    <style:style style:name="T55" style:family="text">
      <style:text-properties style:text-underline-style="solid" style:text-underline-width="auto" style:text-underline-color="font-color"/>
    </style:style>
    <style:style style:name="T56" style:family="text">
      <style:text-properties fo:color="#ff0000" loext:opacity="100%" fo:font-weight="bold" style:font-weight-asian="bold"/>
    </style:style>
    <style:style style:name="T57" style:family="text">
      <style:text-properties fo:color="#ff0000" loext:opacity="100%"/>
    </style:style>
    <style:style style:name="T58" style:family="text">
      <style:text-properties style:font-name-asian="Arial1"/>
    </style:style>
    <style:style style:name="T59" style:family="text">
      <style:text-properties style:font-name="Times New Roman" fo:font-size="11pt" style:font-size-asian="11pt" style:font-size-complex="11pt"/>
    </style:style>
    <style:style style:name="T60" style:family="text">
      <style:text-properties fo:color="#000000" loext:opacity="100%" style:font-size-complex="12pt"/>
    </style:style>
    <style:style style:name="T61" style:family="text">
      <style:text-properties style:font-name-complex="Carlito1"/>
    </style:style>
    <style:style style:name="T62" style:family="text">
      <style:text-properties style:font-name-complex="Carlito1" fo:background-color="#ffffff"/>
    </style:style>
    <style:style style:name="T63" style:family="text">
      <style:text-properties style:font-name="Calibri" fo:font-size="10pt" style:font-name-asian="Calibri1" style:font-size-asian="10pt" style:font-name-complex="Calibri1"/>
    </style:style>
    <style:style style:name="T64" style:family="text">
      <style:text-properties style:font-name="Calibri" fo:font-size="11pt" fo:language="es" fo:country="ES" fo:font-weight="bold" style:font-size-asian="11pt" style:font-weight-asian="bold" style:font-weight-complex="bold"/>
    </style:style>
    <style:style style:name="T65" style:family="text">
      <style:text-properties style:font-name="Calibri" fo:language="es" fo:country="ES" style:font-name-asian="游明朝"/>
    </style:style>
    <style:style style:name="T66" style:family="text">
      <style:text-properties fo:font-size="10pt" style:font-size-asian="10pt" style:font-name-complex="Carlito1" style:font-size-complex="10pt"/>
    </style:style>
    <style:style style:name="T67" style:family="text">
      <style:text-properties fo:font-size="10pt" style:font-size-asian="10pt" style:font-size-complex="10pt"/>
    </style:style>
    <style:style style:name="T68" style:family="text">
      <style:text-properties fo:font-size="10pt" fo:language="es" fo:country="ES" style:font-size-asian="10pt" style:font-size-complex="10pt"/>
    </style:style>
    <style:style style:name="T69" style:family="text">
      <style:text-properties fo:font-size="24pt" fo:language="es" fo:country="ES" style:font-size-asian="24pt" style:font-size-complex="24pt"/>
    </style:style>
    <style:style style:name="T70" style:family="text">
      <style:text-properties fo:font-size="18pt" fo:language="es" fo:country="ES" style:font-size-asian="18pt" style:font-size-complex="18pt"/>
    </style:style>
    <style:style style:name="T71" style:family="text">
      <style:text-properties fo:font-size="13.5pt" fo:language="es" fo:country="ES" style:font-size-asian="13.5pt" style:font-size-complex="13.5pt"/>
    </style:style>
    <style:style style:name="T72" style:family="text">
      <style:text-properties fo:font-size="13.5pt" fo:language="es" fo:country="ES" style:font-size-asian="13.5pt" style:font-size-complex="13.5pt" style:font-weight-complex="bold"/>
    </style:style>
    <style:style style:name="T73" style:family="text">
      <style:text-properties fo:font-size="7pt" fo:language="es" fo:country="ES" style:font-size-asian="7pt" style:font-size-complex="7pt"/>
    </style:style>
    <style:style style:name="T74" style:family="text">
      <style:text-properties fo:font-size="7pt" fo:language="es" fo:country="ES" style:font-size-asian="7pt" style:font-size-complex="7pt" style:font-weight-complex="bold"/>
    </style:style>
    <style:style style:name="T75" style:family="text">
      <style:text-properties fo:language="es" fo:country="MX"/>
    </style:style>
    <style:style style:name="T76" style:family="text">
      <style:text-properties fo:font-size="12pt" fo:language="es" fo:country="ES" fo:font-style="italic" style:font-size-asian="12pt" style:font-style-asian="italic" style:font-style-complex="italic"/>
    </style:style>
    <style:style style:name="T77" style:family="text">
      <style:text-properties fo:font-size="12pt" fo:language="es" fo:country="ES" fo:font-style="italic" style:font-name-asian="Calibri1" style:font-size-asian="12pt" style:font-style-asian="italic" style:font-name-complex="Arial1" style:font-style-complex="italic"/>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loext:rel-width-rel="paragraph"/>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3pt solid #0000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98cm, 1.185cm, 1.827cm, 0.707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Formula">
      <style:graphic-properties fo:margin-left="0cm" fo:margin-right="0cm" fo:margin-top="0cm" fo:margin-bottom="0cm" draw:ole-draw-aspect="1"/>
    </style:style>
    <style:style style:name="fr9" style:family="graphic" style:parent-style-name="OLE">
      <style:graphic-properties style:wrap="parallel" style:number-wrapped-paragraphs="no-limit" style:wrap-contour="false" style:vertical-pos="from-top" style:vertical-rel="paragraph" style:horizontal-pos="from-left" style:horizontal-rel="paragraph" style:flow-with-text="true" draw:ole-draw-aspect="1"/>
    </style:style>
    <style:style style:name="fr10" style:family="graphic" style:parent-style-name="OLE">
      <style:graphic-properties style:wrap="parallel" style:number-wrapped-paragraphs="no-limit" style:wrap-contour="false" style:vertical-pos="from-top" style:vertical-rel="paragraph" style:horizontal-pos="from-left" style:horizontal-rel="page-content" style:flow-with-text="true" draw:ole-draw-aspect="1"/>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parent-style-name="Frame">
      <style:graphic-properties draw:stroke="none" svg:stroke-width="0cm" draw:fill="none" loext:fill-use-slide-background="false" draw:textarea-vertical-align="middle" draw:auto-grow-height="false" fo:min-height="1.018cm" fo:min-width="8.738cm" fo:padding-top="0.254cm" fo:padding-bottom="0.254cm" fo:padding-left="0.254cm" fo:padding-right="0.254cm" fo:wrap-option="wrap" loext:decorative="false" style:run-through="foreground"/>
    </style:style>
    <style:style style:name="gr4" style:family="graphic" style:parent-style-name="Frame">
      <style:graphic-properties draw:stroke="solid" svg:stroke-width="0.035cm" svg:stroke-color="#000000" draw:stroke-linejoin="miter" svg:stroke-linecap="butt" draw:fill="solid" draw:fill-color="#ffffff" draw:textarea-vertical-align="middle" draw:auto-grow-height="false" fo:min-height="1.272cm" fo:min-width="3.249cm" fo:padding-top="0.127cm" fo:padding-bottom="0.127cm" fo:padding-left="0.254cm" fo:padding-right="0.254cm" fo:wrap-option="wrap" loext:decorative="false" style:run-through="foreground"/>
    </style:style>
    <style:style style:name="gr5" style:family="graphic" style:parent-style-name="Frame">
      <style:graphic-properties draw:stroke="solid" svg:stroke-width="0.035cm" svg:stroke-color="#000000" draw:stroke-linejoin="miter" svg:stroke-linecap="butt" draw:fill="solid" draw:fill-color="#ffffff" draw:textarea-vertical-align="middle" draw:auto-grow-height="false" fo:min-height="1.272cm" fo:min-width="2.067cm" fo:padding-top="0.127cm" fo:padding-bottom="0.127cm" fo:padding-left="0.254cm" fo:padding-right="0.254cm" fo:wrap-option="wrap" loext:decorative="false" style:run-through="foreground"/>
    </style:style>
    <style:style style:name="gr6" style:family="graphic" style:parent-style-name="Frame">
      <style:graphic-properties draw:stroke="none" svg:stroke-width="0cm" draw:fill="solid" draw:fill-color="#ffffff" draw:textarea-vertical-align="top" draw:auto-grow-height="false" fo:min-height="2.653cm" fo:min-width="12.617cm" fo:padding-top="0cm" fo:padding-bottom="0cm" fo:padding-left="0cm" fo:padding-right="0cm" fo:wrap-option="wrap" loext:decorative="false" fo:margin-left="0.318cm" fo:margin-right="0.318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ffffff" draw:stroke-linejoin="miter" svg:stroke-linecap="butt" draw:fill="solid" draw:fill-color="#ffffff" draw:textarea-vertical-align="middle" draw:auto-grow-height="false" fo:min-height="0.788cm" fo:min-width="0.527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fo:margin-left="0cm" fo:margin-right="0.065cm" fo:margin-top="0cm" fo:margin-bottom="0.071cm"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middle" draw:auto-grow-height="false" fo:min-height="9.266cm" fo:min-width="18.48cm" fo:padding-top="0.254cm" fo:padding-bottom="0.254cm" fo:padding-left="0.254cm" fo:padding-right="0.254cm" fo:wrap-option="wrap" loext:decorative="false" style:run-through="foreground"/>
    </style:style>
    <style:style style:name="gr10" style:family="graphic" style:parent-style-name="Frame">
      <style:graphic-properties draw:stroke="solid" svg:stroke-width="0.035cm" svg:stroke-color="#000000" draw:stroke-linejoin="miter" svg:stroke-linecap="butt" draw:fill="solid" draw:fill-color="#ffffff" draw:textarea-vertical-align="middle" draw:auto-grow-height="false" fo:min-height="9.52cm" fo:min-width="18.48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1" style:family="graphic" style:parent-style-name="Frame">
      <style:graphic-properties draw:stroke="solid" svg:stroke-width="0.035cm" svg:stroke-color="#000000" draw:stroke-linejoin="miter" svg:stroke-linecap="butt" draw:fill="solid" draw:fill-color="#ffffff" draw:textarea-vertical-align="middle" draw:auto-grow-height="false" fo:min-height="0.804cm" fo:min-width="1.602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2" style:family="graphic" style:parent-style-name="Frame">
      <style:graphic-properties draw:stroke="solid" svg:stroke-width="0.035cm" svg:stroke-color="#000000" draw:stroke-linejoin="miter" svg:stroke-linecap="butt" draw:fill="solid" draw:fill-color="#ffffff" draw:textarea-vertical-align="middle" draw:auto-grow-height="false" fo:min-height="0.732cm" fo:min-width="14.439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3" style:family="graphic" style:parent-style-name="Frame">
      <style:graphic-properties draw:stroke="solid" svg:stroke-width="0.035cm" svg:stroke-color="#000000" draw:stroke-linejoin="miter" svg:stroke-linecap="butt" draw:fill="solid" draw:fill-color="#ffffff" draw:textarea-vertical-align="middle" draw:auto-grow-height="false" fo:min-height="5.161cm" fo:min-width="0.413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4" style:family="graphic" style:parent-style-name="Frame">
      <style:graphic-properties draw:stroke="solid" svg:stroke-width="0.035cm" svg:stroke-color="#000000" draw:stroke-linejoin="miter" svg:stroke-linecap="butt" draw:fill="solid" draw:fill-color="#ffffff" draw:textarea-vertical-align="middle" draw:auto-grow-height="false" fo:min-height="1.106cm" fo:min-width="3.443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5" style:family="graphic" style:parent-style-name="Frame">
      <style:graphic-properties draw:stroke="solid" svg:stroke-width="0.035cm" svg:stroke-color="#000000" draw:stroke-linejoin="miter" svg:stroke-linecap="butt" draw:fill="solid" draw:fill-color="#ffffff" draw:textarea-vertical-align="middle" draw:auto-grow-height="false" fo:min-height="1.42cm" fo:min-width="4.627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6" style:family="graphic" style:parent-style-name="Frame">
      <style:graphic-properties draw:stroke="solid" svg:stroke-width="0.035cm" svg:stroke-color="#000000" draw:stroke-linejoin="miter" svg:stroke-linecap="butt" draw:fill="solid" draw:fill-color="#ffffff" draw:textarea-vertical-align="middle" draw:auto-grow-height="false" fo:min-height="0.527cm" fo:min-width="12.065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17" style:family="graphic" style:parent-style-name="Frame">
      <style:graphic-properties draw:stroke="solid" svg:stroke-width="0.035cm" svg:stroke-color="#4472c4" draw:stroke-linejoin="miter" svg:stroke-linecap="butt" draw:fill="solid" draw:fill-color="#ffffff" draw:textarea-vertical-align="middle" draw:auto-grow-height="false" fo:min-height="1.856cm" fo:min-width="15.81cm" fo:padding-top="0.127cm" fo:padding-bottom="0.127cm" fo:padding-left="0.254cm" fo:padding-right="0.254cm" fo:wrap-option="wrap" loext:decorative="false" style:run-through="foreground">
        <loext:stroke-complex-color loext:theme-type="accent1" loext:color-type="theme"/>
        <loext:fill-complex-color loext:theme-type="light1" loext:color-type="theme"/>
      </style:graphic-properties>
    </style:style>
    <style:style style:name="gr18" style:family="graphic" style:parent-style-name="Frame">
      <style:graphic-properties draw:stroke="solid" svg:stroke-width="0.026cm" svg:stroke-color="#ffc000" draw:stroke-linejoin="miter" svg:stroke-linecap="butt" draw:fill="solid" draw:fill-color="#4472c4" draw:textarea-vertical-align="middle" draw:auto-grow-height="false" fo:min-height="0.496cm" fo:min-width="1.762cm" fo:padding-top="0.254cm" fo:padding-bottom="0.254cm" fo:padding-left="0.254cm" fo:padding-right="0.254cm" fo:wrap-option="wrap" loext:decorative="false" style:run-through="foreground">
        <loext:stroke-complex-color loext:theme-type="accent4" loext:color-type="theme"/>
        <loext:fill-complex-color loext:theme-type="accent1" loext:color-type="theme"/>
      </style:graphic-properties>
    </style:style>
    <style:style style:name="gr19" style:family="graphic" style:parent-style-name="Frame">
      <style:graphic-properties draw:stroke="solid" svg:stroke-width="0.035cm" svg:stroke-color="#000000" draw:stroke-linejoin="miter" svg:stroke-linecap="butt" draw:fill="solid" draw:fill-color="#ffffff" draw:textarea-vertical-align="middle" draw:auto-grow-height="false" fo:min-height="0.573cm" fo:min-width="3.551cm" fo:padding-top="0.127cm" fo:padding-bottom="0.127cm" fo:padding-left="0.254cm" fo:padding-right="0.254cm" fo:wrap-option="wrap" loext:decorative="false" style:run-through="foreground">
        <loext:stroke-complex-color loext:theme-type="dark1" loext:color-type="theme"/>
        <loext:fill-complex-color loext:theme-type="light1" loext:color-type="theme"/>
      </style:graphic-properties>
    </style:style>
    <style:style style:name="gr2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21" style:family="graphic" style:parent-style-name="Frame">
      <style:graphic-properties draw:stroke="solid" svg:stroke-width="0.035cm" svg:stroke-color="#ffffff" draw:stroke-linejoin="miter" svg:stroke-linecap="butt" draw:fill="solid" draw:fill-color="#4472c4" draw:textarea-vertical-align="middle" draw:auto-grow-height="false" fo:min-height="0.496cm" fo:min-width="1.762cm" fo:padding-top="0.254cm" fo:padding-bottom="0.254cm" fo:padding-left="0.254cm" fo:padding-right="0.254cm" fo:wrap-option="wrap" loext:decorative="false" style:run-through="foreground">
        <loext:stroke-complex-color loext:theme-type="light1" loext:color-type="theme"/>
        <loext:fill-complex-color loext:theme-type="accent1" loext:color-type="theme"/>
      </style:graphic-properties>
    </style:style>
    <style:style style:name="gr22" style:family="graphic" style:parent-style-name="Frame">
      <style:graphic-properties draw:stroke="solid" svg:stroke-width="0.035cm" svg:stroke-color="#ffffff" draw:stroke-linejoin="miter" svg:stroke-linecap="butt" draw:fill="solid" draw:fill-color="#4472c4" draw:textarea-vertical-align="middle" draw:auto-grow-height="false" fo:min-height="0.496cm" fo:min-width="1.764cm" fo:padding-top="0.254cm" fo:padding-bottom="0.254cm" fo:padding-left="0.254cm" fo:padding-right="0.254cm" fo:wrap-option="wrap" loext:decorative="false" style:run-through="foreground">
        <loext:stroke-complex-color loext:theme-type="light1" loext:color-type="theme"/>
        <loext:fill-complex-color loext:theme-type="accent1" loext:color-type="theme"/>
      </style:graphic-properties>
    </style:style>
    <style:style style:name="gr23" style:family="graphic" style:parent-style-name="Frame">
      <style:graphic-properties draw:stroke="none" svg:stroke-width="0cm" draw:fill="none" loext:fill-use-slide-background="false" draw:textarea-vertical-align="top" draw:auto-grow-height="false" fo:min-height="5.632cm" fo:min-width="0.019cm" fo:padding-top="0.127cm" fo:padding-bottom="0.127cm" fo:padding-left="0.254cm" fo:padding-right="0.254cm" fo:wrap-option="wrap" loext:decorative="false" style:run-through="foreground"/>
    </style:style>
    <style:style style:name="gr24" style:family="graphic" style:parent-style-name="Frame">
      <style:graphic-properties draw:stroke="none" svg:stroke-width="0cm" draw:fill="none" loext:fill-use-slide-background="false" draw:textarea-vertical-align="top" draw:auto-grow-height="false" fo:min-height="0.302cm" fo:min-width="0.446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6" style:family="graphic" style:parent-style-name="Frame">
      <style:graphic-properties draw:stroke="none" svg:stroke-width="0cm" draw:fill="none" loext:fill-use-slide-background="false" draw:textarea-vertical-align="middle" draw:auto-grow-height="false" fo:min-height="7.093cm" fo:min-width="14.494cm" fo:padding-top="0.254cm" fo:padding-bottom="0.254cm" fo:padding-left="0.254cm" fo:padding-right="0.254cm" fo:wrap-option="wrap" loext:decorative="false" style:run-through="foreground"/>
    </style:style>
    <style:style style:name="gr27" style:family="graphic">
      <style:graphic-properties draw:stroke="solid" svg:stroke-width="0.035cm" svg:stroke-color="#000000" draw:stroke-linejoin="miter" svg:stroke-linecap="butt" draw:fill="none" loext:fill-use-slide-background="false" draw:textarea-vertical-align="middle" draw:auto-grow-height="false" fo:min-height="0.78cm" fo:min-width="0cm" fo:padding-top="0.254cm" fo:padding-bottom="0.254cm" fo:padding-left="0.254cm" fo:padding-right="0.254cm" fo:wrap-option="wrap" loext:decorative="false" style:run-through="foreground"/>
    </style:style>
    <style:style style:name="gr28" style:family="graphic">
      <style:graphic-properties draw:stroke="solid" svg:stroke-width="0.035cm" svg:stroke-color="#000000" draw:stroke-linejoin="miter" svg:stroke-linecap="butt" draw:fill="none" loext:fill-use-slide-background="false" draw:textarea-vertical-align="middle" draw:auto-grow-height="false" fo:min-height="0.42cm" fo:min-width="1.556cm" fo:padding-top="0.254cm" fo:padding-bottom="0.254cm" fo:padding-left="0.254cm" fo:padding-right="0.254cm" fo:wrap-option="wrap" loext:decorative="false" style:run-through="foreground"/>
    </style:style>
    <style:style style:name="gr29" style:family="graphic">
      <style:graphic-properties draw:stroke="solid" svg:stroke-width="0.035cm" svg:stroke-color="#000000" draw:stroke-linejoin="miter" svg:stroke-linecap="butt" draw:fill="none" loext:fill-use-slide-background="false" draw:textarea-vertical-align="middle" draw:auto-grow-height="false" fo:min-height="2.498cm" fo:min-width="0.09cm" fo:padding-top="0.254cm" fo:padding-bottom="0.254cm" fo:padding-left="0.254cm" fo:padding-right="0.254cm" fo:wrap-option="wrap" loext:decorative="false" style:run-through="foreground"/>
    </style:style>
    <style:style style:name="gr30" style:family="graphic">
      <style:graphic-properties draw:stroke="solid" svg:stroke-width="0.035cm" svg:stroke-color="#000000" draw:stroke-linejoin="miter" svg:stroke-linecap="butt" draw:fill="none" loext:fill-use-slide-background="false" draw:textarea-vertical-align="middle" draw:auto-grow-height="false" fo:min-height="0.804cm" fo:min-width="0.09cm" fo:padding-top="0.254cm" fo:padding-bottom="0.254cm" fo:padding-left="0.254cm" fo:padding-right="0.254cm" fo:wrap-option="wrap" loext:decorative="false" style:run-through="foreground"/>
    </style:style>
    <style:style style:name="gr31" style:family="graphic">
      <style:graphic-properties draw:stroke="solid" svg:stroke-width="0.035cm" svg:stroke-color="#000000" draw:stroke-linejoin="miter" svg:stroke-linecap="butt" draw:fill="none" loext:fill-use-slide-background="false" draw:textarea-vertical-align="middle" draw:auto-grow-height="false" fo:min-height="0.42cm" fo:min-width="1.66cm" fo:padding-top="0.254cm" fo:padding-bottom="0.254cm" fo:padding-left="0.254cm" fo:padding-right="0.254cm" fo:wrap-option="wrap" loext:decorative="false" style:run-through="foreground"/>
    </style:style>
    <style:style style:name="gr32" style:family="graphic">
      <style:graphic-properties draw:stroke="solid" svg:stroke-width="0.035cm" svg:stroke-color="#000000" draw:stroke-linejoin="miter" svg:stroke-linecap="butt" draw:fill="none" loext:fill-use-slide-background="false" draw:textarea-vertical-align="middle" draw:auto-grow-height="false" fo:min-height="0.42cm" fo:min-width="0cm" fo:padding-top="0.254cm" fo:padding-bottom="0.254cm" fo:padding-left="0.254cm" fo:padding-right="0.254cm" fo:wrap-option="wrap" loext:decorative="false" style:run-through="foreground"/>
    </style:style>
    <style:style style:name="gr33" style:family="graphic" style:parent-style-name="Frame">
      <style:graphic-properties draw:stroke="solid" svg:stroke-width="0.035cm" svg:stroke-color="#000000" draw:stroke-linejoin="miter" svg:stroke-linecap="butt" draw:fill="solid" draw:fill-color="#ffffff" draw:textarea-vertical-align="middle" draw:auto-grow-height="false" fo:min-height="0.379cm" fo:min-width="4.794cm" fo:padding-top="0.254cm" fo:padding-bottom="0.254cm" fo:padding-left="0.254cm" fo:padding-right="0.254cm" fo:wrap-option="wrap" loext:decorative="false" style:run-through="foreground"/>
    </style:style>
    <style:style style:name="gr34" style:family="graphic" style:parent-style-name="Frame">
      <style:graphic-properties draw:stroke="none" svg:stroke-width="0cm" draw:fill="none" loext:fill-use-slide-background="false" draw:textarea-vertical-align="middle" draw:auto-grow-height="false" fo:min-height="0.852cm" fo:min-width="5.267cm" fo:padding-top="0.018cm" fo:padding-bottom="0.018cm" fo:padding-left="0.018cm" fo:padding-right="0.018cm" fo:wrap-option="wrap" loext:decorative="false" style:run-through="foreground"/>
    </style:style>
    <style:style style:name="gr35" style:family="graphic" style:parent-style-name="Frame">
      <style:graphic-properties draw:stroke="solid" svg:stroke-width="0.035cm" svg:stroke-color="#000000" draw:stroke-linejoin="miter" svg:stroke-linecap="butt" draw:fill="solid" draw:fill-color="#ffffff" draw:textarea-vertical-align="middle" draw:auto-grow-height="false" fo:min-height="0.178cm" fo:min-width="3.999cm" fo:padding-top="0.254cm" fo:padding-bottom="0.254cm" fo:padding-left="0.254cm" fo:padding-right="0.254cm" fo:wrap-option="wrap" loext:decorative="false" style:run-through="foreground"/>
    </style:style>
    <style:style style:name="gr36" style:family="graphic" style:parent-style-name="Frame">
      <style:graphic-properties draw:stroke="none" svg:stroke-width="0cm" draw:fill="none" loext:fill-use-slide-background="false" draw:textarea-vertical-align="middle" draw:auto-grow-height="false" fo:min-height="0.651cm" fo:min-width="4.471cm" fo:padding-top="0.018cm" fo:padding-bottom="0.018cm" fo:padding-left="0.018cm" fo:padding-right="0.018cm" fo:wrap-option="wrap" loext:decorative="false" style:run-through="foreground"/>
    </style:style>
    <style:style style:name="gr37" style:family="graphic" style:parent-style-name="Frame">
      <style:graphic-properties draw:stroke="solid" svg:stroke-width="0.035cm" svg:stroke-color="#000000" draw:stroke-linejoin="miter" svg:stroke-linecap="butt" draw:fill="solid" draw:fill-color="#ffffff" draw:textarea-vertical-align="middle" draw:auto-grow-height="false" fo:min-height="0.272cm" fo:min-width="2.69cm" fo:padding-top="0.254cm" fo:padding-bottom="0.254cm" fo:padding-left="0.254cm" fo:padding-right="0.254cm" fo:wrap-option="wrap" loext:decorative="false" style:run-through="foreground"/>
    </style:style>
    <style:style style:name="gr38" style:family="graphic" style:parent-style-name="Frame">
      <style:graphic-properties draw:stroke="none" svg:stroke-width="0cm" draw:fill="none" loext:fill-use-slide-background="false" draw:textarea-vertical-align="middle" draw:auto-grow-height="false" fo:min-height="0.744cm" fo:min-width="3.163cm" fo:padding-top="0.018cm" fo:padding-bottom="0.018cm" fo:padding-left="0.018cm" fo:padding-right="0.018cm" fo:wrap-option="wrap" loext:decorative="false" style:run-through="foreground"/>
    </style:style>
    <style:style style:name="gr39" style:family="graphic" style:parent-style-name="Frame">
      <style:graphic-properties draw:stroke="solid" svg:stroke-width="0.035cm" svg:stroke-color="#000000" draw:stroke-linejoin="miter" svg:stroke-linecap="butt" draw:fill="solid" draw:fill-color="#ffffff" draw:textarea-vertical-align="middle" draw:auto-grow-height="false" fo:min-height="0.259cm" fo:min-width="1.166cm" fo:padding-top="0.254cm" fo:padding-bottom="0.254cm" fo:padding-left="0.254cm" fo:padding-right="0.254cm" fo:wrap-option="wrap" loext:decorative="false" style:run-through="foreground"/>
    </style:style>
    <style:style style:name="gr40" style:family="graphic" style:parent-style-name="Frame">
      <style:graphic-properties draw:stroke="none" svg:stroke-width="0cm" draw:fill="none" loext:fill-use-slide-background="false" draw:textarea-vertical-align="middle" draw:auto-grow-height="false" fo:min-height="0.732cm" fo:min-width="1.639cm" fo:padding-top="0.018cm" fo:padding-bottom="0.018cm" fo:padding-left="0.018cm" fo:padding-right="0.018cm" fo:wrap-option="wrap" loext:decorative="false" style:run-through="foreground"/>
    </style:style>
    <style:style style:name="gr41" style:family="graphic" style:parent-style-name="Frame">
      <style:graphic-properties draw:stroke="solid" svg:stroke-width="0.035cm" svg:stroke-color="#000000" draw:stroke-linejoin="miter" svg:stroke-linecap="butt" draw:fill="solid" draw:fill-color="#ffffff" draw:textarea-vertical-align="middle" draw:auto-grow-height="false" fo:min-height="0.256cm" fo:min-width="1.189cm" fo:padding-top="0.254cm" fo:padding-bottom="0.254cm" fo:padding-left="0.254cm" fo:padding-right="0.254cm" fo:wrap-option="wrap" loext:decorative="false" style:run-through="foreground"/>
    </style:style>
    <style:style style:name="gr42" style:family="graphic" style:parent-style-name="Frame">
      <style:graphic-properties draw:stroke="none" svg:stroke-width="0cm" draw:fill="none" loext:fill-use-slide-background="false" draw:textarea-vertical-align="middle" draw:auto-grow-height="false" fo:min-height="0.728cm" fo:min-width="1.662cm" fo:padding-top="0.018cm" fo:padding-bottom="0.018cm" fo:padding-left="0.018cm" fo:padding-right="0.018cm" fo:wrap-option="wrap" loext:decorative="false" style:run-through="foreground"/>
    </style:style>
    <style:style style:name="gr43" style:family="graphic" style:parent-style-name="Frame">
      <style:graphic-properties draw:stroke="solid" svg:stroke-width="0.035cm" svg:stroke-color="#000000" draw:stroke-linejoin="miter" svg:stroke-linecap="butt" draw:fill="solid" draw:fill-color="#ffffff" draw:textarea-vertical-align="middle" draw:auto-grow-height="false" fo:min-height="0.319cm" fo:min-width="2.662cm" fo:padding-top="0.254cm" fo:padding-bottom="0.254cm" fo:padding-left="0.254cm" fo:padding-right="0.254cm" fo:wrap-option="wrap" loext:decorative="false" style:run-through="foreground"/>
    </style:style>
    <style:style style:name="gr44" style:family="graphic" style:parent-style-name="Frame">
      <style:graphic-properties draw:stroke="none" svg:stroke-width="0cm" draw:fill="none" loext:fill-use-slide-background="false" draw:textarea-vertical-align="middle" draw:auto-grow-height="false" fo:min-height="0.792cm" fo:min-width="3.134cm" fo:padding-top="0.018cm" fo:padding-bottom="0.018cm" fo:padding-left="0.018cm" fo:padding-right="0.018cm" fo:wrap-option="wrap" loext:decorative="false" style:run-through="foreground"/>
    </style:style>
    <style:style style:name="gr45" style:family="graphic" style:parent-style-name="Frame">
      <style:graphic-properties draw:stroke="solid" svg:stroke-width="0.035cm" svg:stroke-color="#000000" draw:stroke-linejoin="miter" svg:stroke-linecap="butt" draw:fill="solid" draw:fill-color="#ffffff" draw:textarea-vertical-align="middle" draw:auto-grow-height="false" fo:min-height="0.21cm" fo:min-width="1.316cm" fo:padding-top="0.254cm" fo:padding-bottom="0.254cm" fo:padding-left="0.254cm" fo:padding-right="0.254cm" fo:wrap-option="wrap" loext:decorative="false" style:run-through="foreground"/>
    </style:style>
    <style:style style:name="gr46" style:family="graphic" style:parent-style-name="Frame">
      <style:graphic-properties draw:stroke="none" svg:stroke-width="0cm" draw:fill="none" loext:fill-use-slide-background="false" draw:textarea-vertical-align="middle" draw:auto-grow-height="false" fo:min-height="0.683cm" fo:min-width="1.789cm" fo:padding-top="0.018cm" fo:padding-bottom="0.018cm" fo:padding-left="0.018cm" fo:padding-right="0.018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cuación"/>
      </text:sequence-decls>
      <text:p text:style-name="P115" loext:marker-style-name="T1"><text:bookmark text:name="_Hlk91550375"/><text:span text:style-name="T1">UNIVERSIDAD NACIONAL SAN CRISTÓBAL DE HUAMANGA</text:span><text:span text:style-name="T1"/></text:p>
      <text:p text:style-name="P128" loext:marker-style-name="T1"/>
      <text:p text:style-name="P114" loext:marker-style-name="T1"><text:span text:style-name="T1">FACULTAD DE CIENCIAS ECONÓMICAS, ADMINISTRATIVAS Y CONTABLES</text:span><text:span text:style-name="T1"/></text:p>
      <text:p text:style-name="P128" loext:marker-style-name="T1"/>
      <text:p text:style-name="P114" loext:marker-style-name="T1"><text:span text:style-name="T1">ESCUELA PROFESIONAL DE ECONOMÍA</text:span><text:span text:style-name="T1"/></text:p>
      <text:p text:style-name="P114"><draw:frame draw:style-name="fr7" draw:name="image2.png" text:anchor-type="as-char" svg:width="5.013cm" svg:height="4.456cm" draw:z-index="0"><draw:image xlink:href="Pictures/10000001000004950000041389E61CD2.png" xlink:type="simple" xlink:show="embed" xlink:actuate="onLoad" draw:mime-type="image/png"/><svg:desc>Imagen que contiene firmar, hombre, gente, mujer

Descripción generada automáticamente</svg:desc></draw:frame></text:p>
      <text:p text:style-name="P114" loext:marker-style-name="T2"><text:span text:style-name="T2">Estampado de polos personalizados (stampadek)</text:span><text:span text:style-name="T2"/></text:p>
      <text:p text:style-name="P114"/>
      <text:p text:style-name="P114" loext:marker-style-name="T2"><text:span text:style-name="T2">Plan de Negocios</text:span><text:span text:style-name="T2"/></text:p>
      <text:p text:style-name="P128" loext:marker-style-name="T1"/>
      <text:p text:style-name="P114" loext:marker-style-name="T3"><text:span text:style-name="T3">Presentado por:</text:span><text:span text:style-name="T3"/></text:p>
      <text:p text:style-name="P129" loext:marker-style-name="T3"/>
      <text:p text:style-name="P114" loext:marker-style-name="T1"><text:span text:style-name="T1">Elmer Edison ACHALMA MENDOZA</text:span><text:span text:style-name="T1"/></text:p>
      <text:p text:style-name="P114" loext:marker-style-name="T1"><text:span text:style-name="T1">Yudith Carolina, ALCA AYME,</text:span><text:span text:style-name="T1"/></text:p>
      <text:p text:style-name="P114" loext:marker-style-name="T1"><text:span text:style-name="T1">Diana Virginia, GUTIÉRREZ LUCANA,</text:span><text:span text:style-name="T1"/></text:p>
      <text:p text:style-name="P114" loext:marker-style-name="T1"><text:span text:style-name="T1">Kely Daysi, HUAMÁN CENTENO,</text:span><text:span text:style-name="T1"/></text:p>
      <text:p text:style-name="P114" loext:marker-style-name="T1"><text:span text:style-name="T1">Brenda Sofía, HUIZA QUISPE</text:span><text:span text:style-name="T1"/></text:p>
      <text:p text:style-name="P130" loext:marker-style-name="T5"/>
      <text:p text:style-name="P114" loext:marker-style-name="T3"><text:span text:style-name="T3">Asesor: Econ. Tony Oswaldo, HINOJOSA VIVANCO</text:span><text:span text:style-name="T3"/></text:p>
      <text:p text:style-name="P129" loext:marker-style-name="T3"/>
      <text:p text:style-name="P129" loext:marker-style-name="T3"/>
      <text:p text:style-name="P114" loext:marker-style-name="T1"><text:span text:style-name="T1">Ayacucho - Perú</text:span><text:span text:style-name="T1"/></text:p>
      <text:p text:style-name="P114"><text:span text:style-name="T1">Abril, 2021</text:span></text:p>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h text:style-name="P68" text:outline-level="1" loext:marker-style-name="T4"><text:bookmark-start text:name="_Toc106699111"/><text:soft-page-break/><text:span text:style-name="T4">Índice</text:span><text:bookmark-end text:name="_Toc106699111"/><text:span text:style-name="T4"/></text:h>
          </text:index-title>
          <text:p text:style-name="P58" loext:marker-style-name="T26"><text:a xlink:type="simple" xlink:href="#_Toc106699111" text:style-name="Index_20_Link" text:visited-style-name="Index_20_Link"><text:span text:style-name="T6">Índice</text:span><text:span text:style-name="T25"><text:tab/>2</text:span></text:a></text:p>
          <text:p text:style-name="P58" loext:marker-style-name="T26"><text:a xlink:type="simple" xlink:href="#_Toc106699112" text:style-name="Index_20_Link" text:visited-style-name="Index_20_Link"><text:span text:style-name="T6">Índice de tablas</text:span><text:span text:style-name="T25"><text:tab/>7</text:span></text:a></text:p>
          <text:p text:style-name="P59" loext:marker-style-name="T26"><text:a xlink:type="simple" xlink:href="#_Toc106699113" text:style-name="Index_20_Link" text:visited-style-name="Index_20_Link"><text:span text:style-name="T30">1.</text:span><text:span text:style-name="T26"><text:tab/></text:span><text:span text:style-name="T30">RESUMEN EJECUTIVO</text:span><text:span text:style-name="T25"><text:tab/>9</text:span></text:a></text:p>
          <text:p text:style-name="P58" loext:marker-style-name="T26"><text:a xlink:type="simple" xlink:href="#_Toc106699114" text:style-name="Index_20_Link" text:visited-style-name="Index_20_Link"><text:span text:style-name="T30">Capítulo I. – Producto, Modelo y Empresa</text:span><text:span text:style-name="T25"><text:tab/>10</text:span></text:a></text:p>
          <text:p text:style-name="P62" loext:marker-style-name="T26"><text:a xlink:type="simple" xlink:href="#_Toc106699115" text:style-name="Index_20_Link" text:visited-style-name="Index_20_Link"><text:span text:style-name="T30">1.1</text:span><text:span text:style-name="T26"><text:tab/></text:span><text:span text:style-name="T30">Desarrollo del producto o servicio</text:span><text:span text:style-name="T25"><text:tab/>10</text:span></text:a></text:p>
          <text:p text:style-name="P64" loext:marker-style-name="T26"><text:a xlink:type="simple" xlink:href="#_Toc106699116" text:style-name="Index_20_Link" text:visited-style-name="Index_20_Link"><text:span text:style-name="T30">1.1.1</text:span><text:span text:style-name="T26"><text:tab/></text:span><text:span text:style-name="T30">Concepto del producto</text:span><text:span text:style-name="T25"><text:tab/>10</text:span></text:a></text:p>
          <text:p text:style-name="P64" loext:marker-style-name="T26"><text:a xlink:type="simple" xlink:href="#_Toc106699117" text:style-name="Index_20_Link" text:visited-style-name="Index_20_Link"><text:span text:style-name="T30">1.1.2</text:span><text:span text:style-name="T26"><text:tab/></text:span><text:span text:style-name="T30">Análisis FODA</text:span><text:span text:style-name="T25"><text:tab/>10</text:span></text:a></text:p>
          <text:p text:style-name="P62" loext:marker-style-name="T26"><text:a xlink:type="simple" xlink:href="#_Toc106699118" text:style-name="Index_20_Link" text:visited-style-name="Index_20_Link"><text:span text:style-name="T30">1.2</text:span><text:span text:style-name="T26"><text:tab/></text:span><text:span text:style-name="T30">Diseño estratégico de la empresa</text:span><text:span text:style-name="T25"><text:tab/>11</text:span></text:a></text:p>
          <text:p text:style-name="P64" loext:marker-style-name="T26"><text:a xlink:type="simple" xlink:href="#_Toc106699119" text:style-name="Index_20_Link" text:visited-style-name="Index_20_Link"><text:span text:style-name="T30">1.2.1</text:span><text:span text:style-name="T26"><text:tab/></text:span><text:span text:style-name="T30">Misión</text:span><text:span text:style-name="T25"><text:tab/>11</text:span></text:a></text:p>
          <text:p text:style-name="P64" loext:marker-style-name="T26"><text:a xlink:type="simple" xlink:href="#_Toc106699120" text:style-name="Index_20_Link" text:visited-style-name="Index_20_Link"><text:span text:style-name="T30">1.2.2</text:span><text:span text:style-name="T26"><text:tab/></text:span><text:span text:style-name="T30">Visión</text:span><text:span text:style-name="T25"><text:tab/>11</text:span></text:a></text:p>
          <text:p text:style-name="P64" loext:marker-style-name="T26"><text:a xlink:type="simple" xlink:href="#_Toc106699121" text:style-name="Index_20_Link" text:visited-style-name="Index_20_Link"><text:span text:style-name="T30">1.2.3</text:span><text:span text:style-name="T26"><text:tab/></text:span><text:span text:style-name="T30">Objetivos de empresa</text:span><text:span text:style-name="T25"><text:tab/>11</text:span></text:a></text:p>
          <text:p text:style-name="P64" loext:marker-style-name="T26"><text:a xlink:type="simple" xlink:href="#_Toc106699122" text:style-name="Index_20_Link" text:visited-style-name="Index_20_Link"><text:span text:style-name="T30">1.2.4</text:span><text:span text:style-name="T26"><text:tab/></text:span><text:span text:style-name="T30">Estrategias de la empresa</text:span><text:span text:style-name="T25"><text:tab/>12</text:span></text:a></text:p>
          <text:p text:style-name="P60" loext:marker-style-name="T26"><text:a xlink:type="simple" xlink:href="#_Toc106699123" text:style-name="Index_20_Link" text:visited-style-name="Index_20_Link"><text:span text:style-name="T30">2</text:span><text:span text:style-name="T26"><text:tab/></text:span><text:span text:style-name="T30">Capítulo II.- Estudio del Mercado</text:span><text:span text:style-name="T25"><text:tab/>13</text:span></text:a></text:p>
          <text:p text:style-name="P62" loext:marker-style-name="T26"><text:a xlink:type="simple" xlink:href="#_Toc106699124" text:style-name="Index_20_Link" text:visited-style-name="Index_20_Link"><text:span text:style-name="T30">2.1</text:span><text:span text:style-name="T26"><text:tab/></text:span><text:span text:style-name="T30">Análisis de mercado</text:span><text:span text:style-name="T25"><text:tab/>13</text:span></text:a></text:p>
          <text:p text:style-name="P64" loext:marker-style-name="T26"><text:a xlink:type="simple" xlink:href="#_Toc106699125" text:style-name="Index_20_Link" text:visited-style-name="Index_20_Link"><text:span text:style-name="T30">2.1.1</text:span><text:span text:style-name="T26"><text:tab/></text:span><text:span text:style-name="T30">Mercado total</text:span><text:span text:style-name="T25"><text:tab/>13</text:span></text:a></text:p>
          <text:p text:style-name="P64" loext:marker-style-name="T26"><text:a xlink:type="simple" xlink:href="#_Toc106699126" text:style-name="Index_20_Link" text:visited-style-name="Index_20_Link"><text:span text:style-name="T30">2.1.2</text:span><text:span text:style-name="T26"><text:tab/></text:span><text:span text:style-name="T30">Mercado potencial</text:span><text:span text:style-name="T25"><text:tab/>13</text:span></text:a></text:p>
          <text:p text:style-name="P64" loext:marker-style-name="T26"><text:a xlink:type="simple" xlink:href="#_Toc106699127" text:style-name="Index_20_Link" text:visited-style-name="Index_20_Link"><text:span text:style-name="T30">2.1.3</text:span><text:span text:style-name="T26"><text:tab/></text:span><text:span text:style-name="T30">Mercado objetivo</text:span><text:span text:style-name="T25"><text:tab/>13</text:span></text:a></text:p>
          <text:p text:style-name="P64" loext:marker-style-name="T26"><text:a xlink:type="simple" xlink:href="#_Toc106699128" text:style-name="Index_20_Link" text:visited-style-name="Index_20_Link"><text:span text:style-name="T30">2.1.4</text:span><text:span text:style-name="T26"><text:tab/></text:span><text:span text:style-name="T30">Mercado del consumidor</text:span><text:span text:style-name="T25"><text:tab/>13</text:span></text:a></text:p>
          <text:p text:style-name="P62" loext:marker-style-name="T26"><text:a xlink:type="simple" xlink:href="#_Toc106699129" text:style-name="Index_20_Link" text:visited-style-name="Index_20_Link"><text:span text:style-name="T30">2.2</text:span><text:span text:style-name="T26"><text:tab/></text:span><text:span text:style-name="T30">Análisis de la demanda</text:span><text:span text:style-name="T25"><text:tab/>13</text:span></text:a></text:p>
          <text:p text:style-name="P64" loext:marker-style-name="T26"><text:a xlink:type="simple" xlink:href="#_Toc106699130" text:style-name="Index_20_Link" text:visited-style-name="Index_20_Link"><text:span text:style-name="T30">2.2.1</text:span><text:span text:style-name="T26"><text:tab/></text:span><text:span text:style-name="T30">Demanda presente</text:span><text:span text:style-name="T25"><text:tab/>13</text:span></text:a></text:p>
          <text:p text:style-name="P64" loext:marker-style-name="T26"><text:a xlink:type="simple" xlink:href="#_Toc106699131" text:style-name="Index_20_Link" text:visited-style-name="Index_20_Link"><text:span text:style-name="T30">2.2.2</text:span><text:span text:style-name="T26"><text:tab/></text:span><text:span text:style-name="T30">Demanda Futura</text:span><text:span text:style-name="T25"><text:tab/>15</text:span></text:a></text:p>
          <text:p text:style-name="P62" loext:marker-style-name="T26"><text:a xlink:type="simple" xlink:href="#_Toc106699132" text:style-name="Index_20_Link" text:visited-style-name="Index_20_Link"><text:span text:style-name="T30">2.3</text:span><text:span text:style-name="T26"><text:tab/></text:span><text:span text:style-name="T30">Análisis de la oferta</text:span><text:span text:style-name="T25"><text:tab/>16</text:span></text:a></text:p>
          <text:p text:style-name="P64" loext:marker-style-name="T26"><text:a xlink:type="simple" xlink:href="#_Toc106699133" text:style-name="Index_20_Link" text:visited-style-name="Index_20_Link"><text:span text:style-name="T30">2.3.1</text:span><text:span text:style-name="T26"><text:tab/></text:span><text:span text:style-name="T30">Descripción del mercado de la oferta.</text:span><text:span text:style-name="T25"><text:tab/>16</text:span></text:a></text:p>
          <text:p text:style-name="P62" loext:marker-style-name="T26"><text:a xlink:type="simple" xlink:href="#_Toc106699134" text:style-name="Index_20_Link" text:visited-style-name="Index_20_Link"><text:span text:style-name="T30">2.4</text:span><text:span text:style-name="T26"><text:tab/></text:span><text:span text:style-name="T30">Balance Oferta-Demanda.</text:span><text:span text:style-name="T25"><text:tab/>16</text:span></text:a></text:p>
          <text:p text:style-name="P62" loext:marker-style-name="T26"><text:a xlink:type="simple" xlink:href="#_Toc106699135" text:style-name="Index_20_Link" text:visited-style-name="Index_20_Link"><text:span text:style-name="T30">2.5</text:span><text:span text:style-name="T26"><text:tab/></text:span><text:span text:style-name="T30">Pronóstico de la demanda.</text:span><text:span text:style-name="T25"><text:tab/>17</text:span></text:a></text:p>
          <text:p text:style-name="P62" loext:marker-style-name="T26"><text:a xlink:type="simple" xlink:href="#_Toc106699136" text:style-name="Index_20_Link" text:visited-style-name="Index_20_Link"><text:span text:style-name="T30">2.6</text:span><text:span text:style-name="T26"><text:tab/></text:span><text:span text:style-name="T30">Estrategias de Marketing.</text:span><text:span text:style-name="T25"><text:tab/>18</text:span></text:a></text:p>
          <text:p text:style-name="P64" loext:marker-style-name="T26"><text:a xlink:type="simple" xlink:href="#_Toc106699137" text:style-name="Index_20_Link" text:visited-style-name="Index_20_Link"><text:span text:style-name="T30">2.6.1</text:span><text:span text:style-name="T26"><text:tab/></text:span><text:span text:style-name="T30">Producto</text:span><text:span text:style-name="T25"><text:tab/>18</text:span></text:a></text:p>
          <text:p text:style-name="P64" loext:marker-style-name="T26"><text:a xlink:type="simple" xlink:href="#_Toc106699138" text:style-name="Index_20_Link" text:visited-style-name="Index_20_Link"><text:span text:style-name="T30">2.6.2</text:span><text:span text:style-name="T26"><text:tab/></text:span><text:span text:style-name="T30">Precio</text:span><text:span text:style-name="T25"><text:tab/>18</text:span></text:a></text:p>
          <text:p text:style-name="P64" loext:marker-style-name="T26"><text:a xlink:type="simple" xlink:href="#_Toc106699139" text:style-name="Index_20_Link" text:visited-style-name="Index_20_Link"><text:span text:style-name="T30">2.6.3</text:span><text:span text:style-name="T26"><text:tab/></text:span><text:span text:style-name="T30">Plaza o distribución</text:span><text:span text:style-name="T25"><text:tab/>18</text:span></text:a></text:p>
          <text:p text:style-name="P64" loext:marker-style-name="T26"><text:a xlink:type="simple" xlink:href="#_Toc106699140" text:style-name="Index_20_Link" text:visited-style-name="Index_20_Link"><text:span text:style-name="T30">2.6.4</text:span><text:span text:style-name="T26"><text:tab/></text:span><text:span text:style-name="T30">Promoción y publicidad</text:span><text:span text:style-name="T25"><text:tab/>18</text:span></text:a></text:p>
          <text:p text:style-name="P62" loext:marker-style-name="T26"><text:a xlink:type="simple" xlink:href="#_Toc106699141" text:style-name="Index_20_Link" text:visited-style-name="Index_20_Link"><text:span text:style-name="T30">2.7</text:span><text:span text:style-name="T26"><text:tab/></text:span><text:span text:style-name="T30">Presupuesto Promocional</text:span><text:span text:style-name="T25"><text:tab/>18</text:span></text:a></text:p>
          <text:p text:style-name="P62" loext:marker-style-name="T26"><text:a xlink:type="simple" xlink:href="#_Toc106699142" text:style-name="Index_20_Link" text:visited-style-name="Index_20_Link"><text:span text:style-name="T30">2.8</text:span><text:span text:style-name="T26"><text:tab/></text:span><text:span text:style-name="T30">Modelo de negocio CANVAS</text:span><text:span text:style-name="T25"><text:tab/>20</text:span></text:a></text:p>
          <text:p text:style-name="P60" loext:marker-style-name="T26"><text:a xlink:type="simple" xlink:href="#_Toc106699143" text:style-name="Index_20_Link" text:visited-style-name="Index_20_Link"><text:span text:style-name="T30">3</text:span><text:span text:style-name="T26"><text:tab/></text:span><text:span text:style-name="T30">Capitulo III.- <text:s/>Estudio Técnico</text:span><text:span text:style-name="T25"><text:tab/>21</text:span></text:a></text:p>
          <text:p text:style-name="P62" loext:marker-style-name="T26"><text:a xlink:type="simple" xlink:href="#_Toc106699144" text:style-name="Index_20_Link" text:visited-style-name="Index_20_Link"><text:span text:style-name="T30">3.1</text:span><text:span text:style-name="T26"><text:tab/></text:span><text:span text:style-name="T30">Tamaño y localización del proyecto</text:span><text:span text:style-name="T25"><text:tab/>21</text:span></text:a></text:p>
          <text:p text:style-name="P64" loext:marker-style-name="T26"><text:a xlink:type="simple" xlink:href="#_Toc106699145" text:style-name="Index_20_Link" text:visited-style-name="Index_20_Link"><text:span text:style-name="T30">3.1.1</text:span><text:span text:style-name="T26"><text:tab/></text:span><text:span text:style-name="T30">Tamaño</text:span><text:span text:style-name="T25"><text:tab/>21</text:span></text:a></text:p>
          <text:p text:style-name="P64" loext:marker-style-name="T26"><text:a xlink:type="simple" xlink:href="#_Toc106699146" text:style-name="Index_20_Link" text:visited-style-name="Index_20_Link"><text:soft-page-break/><text:span text:style-name="T30">3.1.2</text:span><text:span text:style-name="T26"><text:tab/></text:span><text:span text:style-name="T30">Localización del proyecto</text:span><text:span text:style-name="T25"><text:tab/>21</text:span></text:a></text:p>
          <text:p text:style-name="P62" loext:marker-style-name="T26"><text:a xlink:type="simple" xlink:href="#_Toc106699147" text:style-name="Index_20_Link" text:visited-style-name="Index_20_Link"><text:span text:style-name="T30">3.2</text:span><text:span text:style-name="T26"><text:tab/></text:span><text:span text:style-name="T30">Diseño del bien o servicio</text:span><text:span text:style-name="T25"><text:tab/>22</text:span></text:a></text:p>
          <text:p text:style-name="P64" loext:marker-style-name="T26"><text:a xlink:type="simple" xlink:href="#_Toc106699148" text:style-name="Index_20_Link" text:visited-style-name="Index_20_Link"><text:span text:style-name="T30">3.2.1</text:span><text:span text:style-name="T26"><text:tab/></text:span><text:span text:style-name="T30">Composición Físico – Química</text:span><text:span text:style-name="T25"><text:tab/>22</text:span></text:a></text:p>
          <text:p text:style-name="P64" loext:marker-style-name="T26"><text:a xlink:type="simple" xlink:href="#_Toc106699149" text:style-name="Index_20_Link" text:visited-style-name="Index_20_Link"><text:span text:style-name="T30">3.2.2</text:span><text:span text:style-name="T26"><text:tab/></text:span><text:span text:style-name="T30">Forma de funcionamiento</text:span><text:span text:style-name="T25"><text:tab/>22</text:span></text:a></text:p>
          <text:p text:style-name="P64" loext:marker-style-name="T26"><text:a xlink:type="simple" xlink:href="#_Toc106699150" text:style-name="Index_20_Link" text:visited-style-name="Index_20_Link"><text:span text:style-name="T30">3.2.3</text:span><text:span text:style-name="T26"><text:tab/></text:span><text:span text:style-name="T30">Forma de uso</text:span><text:span text:style-name="T25"><text:tab/>22</text:span></text:a></text:p>
          <text:p text:style-name="P64" loext:marker-style-name="T26"><text:a xlink:type="simple" xlink:href="#_Toc106699151" text:style-name="Index_20_Link" text:visited-style-name="Index_20_Link"><text:span text:style-name="T30">3.2.4</text:span><text:span text:style-name="T26"><text:tab/></text:span><text:span text:style-name="T30">Empaque</text:span><text:span text:style-name="T25"><text:tab/>23</text:span></text:a></text:p>
          <text:p text:style-name="P64" loext:marker-style-name="T26"><text:a xlink:type="simple" xlink:href="#_Toc106699152" text:style-name="Index_20_Link" text:visited-style-name="Index_20_Link"><text:span text:style-name="T30">3.2.5</text:span><text:span text:style-name="T26"><text:tab/></text:span><text:span text:style-name="T30">Presentación</text:span><text:span text:style-name="T25"><text:tab/>23</text:span></text:a></text:p>
          <text:p text:style-name="P64" loext:marker-style-name="T26"><text:a xlink:type="simple" xlink:href="#_Toc106699153" text:style-name="Index_20_Link" text:visited-style-name="Index_20_Link"><text:span text:style-name="T30">3.2.6</text:span><text:span text:style-name="T26"><text:tab/></text:span><text:span text:style-name="T30">Marca</text:span><text:span text:style-name="T25"><text:tab/>23</text:span></text:a></text:p>
          <text:p text:style-name="P64" loext:marker-style-name="T26"><text:a xlink:type="simple" xlink:href="#_Toc106699154" text:style-name="Index_20_Link" text:visited-style-name="Index_20_Link"><text:span text:style-name="T30">3.2.7</text:span><text:span text:style-name="T26"><text:tab/></text:span><text:span text:style-name="T30">Logotipo e isotipo</text:span><text:span text:style-name="T25"><text:tab/>23</text:span></text:a></text:p>
          <text:p text:style-name="P64" loext:marker-style-name="T26"><text:a xlink:type="simple" xlink:href="#_Toc106699155" text:style-name="Index_20_Link" text:visited-style-name="Index_20_Link"><text:span text:style-name="T30">3.2.8</text:span><text:span text:style-name="T26"><text:tab/></text:span><text:span text:style-name="T30">Bienes conexos</text:span><text:span text:style-name="T25"><text:tab/>24</text:span></text:a></text:p>
          <text:p text:style-name="P62" loext:marker-style-name="T26"><text:a xlink:type="simple" xlink:href="#_Toc106699156" text:style-name="Index_20_Link" text:visited-style-name="Index_20_Link"><text:span text:style-name="T30">3.3</text:span><text:span text:style-name="T26"><text:tab/></text:span><text:span text:style-name="T30">Proceso de producción o prestación del servicio</text:span><text:span text:style-name="T25"><text:tab/>24</text:span></text:a></text:p>
          <text:p text:style-name="P64" loext:marker-style-name="T26"><text:a xlink:type="simple" xlink:href="#_Toc106699157" text:style-name="Index_20_Link" text:visited-style-name="Index_20_Link"><text:span text:style-name="T30">3.3.1</text:span><text:span text:style-name="T26"><text:tab/></text:span><text:span text:style-name="T30">Tecnología del Proceso</text:span><text:span text:style-name="T25"><text:tab/>25</text:span></text:a></text:p>
          <text:p text:style-name="P64" loext:marker-style-name="T26"><text:a xlink:type="simple" xlink:href="#_Toc106699158" text:style-name="Index_20_Link" text:visited-style-name="Index_20_Link"><text:span text:style-name="T30">3.3.2</text:span><text:span text:style-name="T26"><text:tab/></text:span><text:span text:style-name="T30">Diagrama de flujo de procesos</text:span><text:span text:style-name="T25"><text:tab/>26</text:span></text:a></text:p>
          <text:p text:style-name="P62" loext:marker-style-name="T26"><text:a xlink:type="simple" xlink:href="#_Toc106699159" text:style-name="Index_20_Link" text:visited-style-name="Index_20_Link"><text:span text:style-name="T30">3.4</text:span><text:span text:style-name="T26"><text:tab/></text:span><text:span text:style-name="T30">Distribución de planta e instalaciones</text:span><text:span text:style-name="T25"><text:tab/>27</text:span></text:a></text:p>
          <text:p text:style-name="P62" loext:marker-style-name="T26"><text:a xlink:type="simple" xlink:href="#_Toc106699160" text:style-name="Index_20_Link" text:visited-style-name="Index_20_Link"><text:span text:style-name="T30">3.5</text:span><text:span text:style-name="T26"><text:tab/></text:span><text:span text:style-name="T30">Diseño del trabajo</text:span><text:span text:style-name="T25"><text:tab/>28</text:span></text:a></text:p>
          <text:p text:style-name="P60" loext:marker-style-name="T26"><text:a xlink:type="simple" xlink:href="#_Toc106699161" text:style-name="Index_20_Link" text:visited-style-name="Index_20_Link"><text:span text:style-name="T30">4</text:span><text:span text:style-name="T26"><text:tab/></text:span><text:span text:style-name="T30">Capítulo IV.- Estudio Administrativo y Legal</text:span><text:span text:style-name="T25"><text:tab/>28</text:span></text:a></text:p>
          <text:p text:style-name="P62" loext:marker-style-name="T26"><text:a xlink:type="simple" xlink:href="#_Toc106699162" text:style-name="Index_20_Link" text:visited-style-name="Index_20_Link"><text:span text:style-name="T30">4.1</text:span><text:span text:style-name="T26"><text:tab/></text:span><text:span text:style-name="T30">Estudio legal</text:span><text:span text:style-name="T25"><text:tab/>28</text:span></text:a></text:p>
          <text:p text:style-name="P64" loext:marker-style-name="T26"><text:a xlink:type="simple" xlink:href="#_Toc106699163" text:style-name="Index_20_Link" text:visited-style-name="Index_20_Link"><text:span text:style-name="T30">4.1.1</text:span><text:span text:style-name="T26"><text:tab/></text:span><text:span text:style-name="T30">Estructura societaria de la empresa</text:span><text:span text:style-name="T25"><text:tab/>28</text:span></text:a></text:p>
          <text:p text:style-name="P64" loext:marker-style-name="T26"><text:a xlink:type="simple" xlink:href="#_Toc106699164" text:style-name="Index_20_Link" text:visited-style-name="Index_20_Link"><text:span text:style-name="T30">4.1.2</text:span><text:span text:style-name="T26"><text:tab/></text:span><text:span text:style-name="T30">Constitución de la Empresa</text:span><text:span text:style-name="T25"><text:tab/>29</text:span></text:a></text:p>
          <text:p text:style-name="P64" loext:marker-style-name="T26"><text:a xlink:type="simple" xlink:href="#_Toc106699165" text:style-name="Index_20_Link" text:visited-style-name="Index_20_Link"><text:span text:style-name="T30">4.1.3</text:span><text:span text:style-name="T26"><text:tab/></text:span><text:span text:style-name="T30">Licencia de funcionamiento</text:span><text:span text:style-name="T25"><text:tab/>29</text:span></text:a></text:p>
          <text:p text:style-name="P62" loext:marker-style-name="T26"><text:a xlink:type="simple" xlink:href="#_Toc106699166" text:style-name="Index_20_Link" text:visited-style-name="Index_20_Link"><text:span text:style-name="T30">4.2</text:span><text:span text:style-name="T26"><text:tab/></text:span><text:span text:style-name="T30">Estudio organizacional.</text:span><text:span text:style-name="T25"><text:tab/>30</text:span></text:a></text:p>
          <text:p text:style-name="P64" loext:marker-style-name="T26"><text:a xlink:type="simple" xlink:href="#_Toc106699167" text:style-name="Index_20_Link" text:visited-style-name="Index_20_Link"><text:span text:style-name="T30">4.2.1</text:span><text:span text:style-name="T26"><text:tab/></text:span><text:span text:style-name="T30">Tamaño de la empresa.</text:span><text:span text:style-name="T25"><text:tab/>30</text:span></text:a></text:p>
          <text:p text:style-name="P64" loext:marker-style-name="T26"><text:a xlink:type="simple" xlink:href="#_Toc106699168" text:style-name="Index_20_Link" text:visited-style-name="Index_20_Link"><text:span text:style-name="T30">4.2.2</text:span><text:span text:style-name="T26"><text:tab/></text:span><text:span text:style-name="T30">Objetivos del área de organización</text:span><text:span text:style-name="T25"><text:tab/>30</text:span></text:a></text:p>
          <text:p text:style-name="P64" loext:marker-style-name="T26"><text:a xlink:type="simple" xlink:href="#_Toc106699169" text:style-name="Index_20_Link" text:visited-style-name="Index_20_Link"><text:span text:style-name="T30">4.2.3</text:span><text:span text:style-name="T26"><text:tab/></text:span><text:span text:style-name="T30">Estructura organizacional:</text:span><text:span text:style-name="T25"><text:tab/>30</text:span></text:a></text:p>
          <text:p text:style-name="P64" loext:marker-style-name="T26"><text:a xlink:type="simple" xlink:href="#_Toc106699170" text:style-name="Index_20_Link" text:visited-style-name="Index_20_Link"><text:span text:style-name="T30">4.2.4</text:span><text:span text:style-name="T26"><text:tab/></text:span><text:span text:style-name="T30">Perfil de puestos y funciones</text:span><text:span text:style-name="T25"><text:tab/>31</text:span></text:a></text:p>
          <text:p text:style-name="P64" loext:marker-style-name="T26"><text:a xlink:type="simple" xlink:href="#_Toc106699171" text:style-name="Index_20_Link" text:visited-style-name="Index_20_Link"><text:span text:style-name="T30">4.2.5</text:span><text:span text:style-name="T26"><text:tab/></text:span><text:span text:style-name="T30">Captación de personal</text:span><text:span text:style-name="T25"><text:tab/>33</text:span></text:a></text:p>
          <text:p text:style-name="P64" loext:marker-style-name="T26"><text:a xlink:type="simple" xlink:href="#_Toc106699172" text:style-name="Index_20_Link" text:visited-style-name="Index_20_Link"><text:span text:style-name="T30">4.2.6</text:span><text:span text:style-name="T26"><text:tab/></text:span><text:span text:style-name="T30">Desarrollo de personal</text:span><text:span text:style-name="T25"><text:tab/>33</text:span></text:a></text:p>
          <text:p text:style-name="P64" loext:marker-style-name="T26"><text:a xlink:type="simple" xlink:href="#_Toc106699173" text:style-name="Index_20_Link" text:visited-style-name="Index_20_Link"><text:span text:style-name="T30">4.2.7</text:span><text:span text:style-name="T26"><text:tab/></text:span><text:span text:style-name="T30">Administración de sueldos y salarios</text:span><text:span text:style-name="T25"><text:tab/>33</text:span></text:a></text:p>
          <text:p text:style-name="P62" loext:marker-style-name="T26"><text:a xlink:type="simple" xlink:href="#_Toc106699174" text:style-name="Index_20_Link" text:visited-style-name="Index_20_Link"><text:span text:style-name="T30">4.3</text:span><text:span text:style-name="T26"><text:tab/></text:span><text:span text:style-name="T30">Estudio tributario</text:span><text:span text:style-name="T25"><text:tab/>34</text:span></text:a></text:p>
          <text:p text:style-name="P64" loext:marker-style-name="T26"><text:a xlink:type="simple" xlink:href="#_Toc106699175" text:style-name="Index_20_Link" text:visited-style-name="Index_20_Link"><text:span text:style-name="T30">4.3.1</text:span><text:span text:style-name="T26"><text:tab/></text:span><text:span text:style-name="T30">Régimen Tributario</text:span><text:span text:style-name="T25"><text:tab/>34</text:span></text:a></text:p>
          <text:p text:style-name="P58" loext:marker-style-name="T26"><text:a xlink:type="simple" xlink:href="#_Toc106699176" text:style-name="Index_20_Link" text:visited-style-name="Index_20_Link"><text:soft-page-break/><text:span text:style-name="T6">5. Capítulo V. Inversión y valor de recupero</text:span><text:span text:style-name="T25"><text:tab/>35</text:span></text:a></text:p>
          <text:p text:style-name="P63" loext:marker-style-name="T26"><text:a xlink:type="simple" xlink:href="#_Toc106699177" text:style-name="Index_20_Link" text:visited-style-name="Index_20_Link"><text:span text:style-name="T6">5.1. Presupuesto de Inversión</text:span><text:span text:style-name="T25"><text:tab/>35</text:span></text:a></text:p>
          <text:p text:style-name="P65" loext:marker-style-name="T26"><text:a xlink:type="simple" xlink:href="#_Toc106699178" text:style-name="Index_20_Link" text:visited-style-name="Index_20_Link"><text:span text:style-name="T6">5.1.1. Activos Fijos</text:span><text:span text:style-name="T25"><text:tab/>35</text:span></text:a></text:p>
          <text:p text:style-name="P65" loext:marker-style-name="T26"><text:a xlink:type="simple" xlink:href="#_Toc106699179" text:style-name="Index_20_Link" text:visited-style-name="Index_20_Link"><text:span text:style-name="T6">5.1.2. Inversión en Activos Intangibles</text:span><text:span text:style-name="T25"><text:tab/>35</text:span></text:a></text:p>
          <text:p text:style-name="P65" loext:marker-style-name="T26"><text:a xlink:type="simple" xlink:href="#_Toc106699180" text:style-name="Index_20_Link" text:visited-style-name="Index_20_Link"><text:span text:style-name="T6">5.1.3. <text:s/>Inversión en Capital de Trabajo</text:span><text:span text:style-name="T25"><text:tab/>36</text:span></text:a></text:p>
          <text:p text:style-name="P63" loext:marker-style-name="T26"><text:a xlink:type="simple" xlink:href="#_Toc106699181" text:style-name="Index_20_Link" text:visited-style-name="Index_20_Link"><text:span text:style-name="T6">5.2 Horizonte de Evaluación</text:span><text:span text:style-name="T25"><text:tab/>36</text:span></text:a></text:p>
          <text:p text:style-name="P63" loext:marker-style-name="T26"><text:a xlink:type="simple" xlink:href="#_Toc106699182" text:style-name="Index_20_Link" text:visited-style-name="Index_20_Link"><text:span text:style-name="T6">5.3. <text:s/>Valores de Recupero</text:span><text:span text:style-name="T25"><text:tab/>37</text:span></text:a></text:p>
          <text:p text:style-name="P65" loext:marker-style-name="T26"><text:a xlink:type="simple" xlink:href="#_Toc106699183" text:style-name="Index_20_Link" text:visited-style-name="Index_20_Link"><text:span text:style-name="T33">5.3.1. <text:s/></text:span><text:span text:style-name="T6">Método Contable</text:span><text:span text:style-name="T25"><text:tab/>37</text:span></text:a></text:p>
          <text:p text:style-name="P58" loext:marker-style-name="T26"><text:a xlink:type="simple" xlink:href="#_Toc106699184" text:style-name="Index_20_Link" text:visited-style-name="Index_20_Link"><text:span text:style-name="T6">6. Capítulo VI. Presupuesto de ingresos y egresos</text:span><text:span text:style-name="T25"><text:tab/>38</text:span></text:a></text:p>
          <text:p text:style-name="P63" loext:marker-style-name="T26"><text:a xlink:type="simple" xlink:href="#_Toc106699185" text:style-name="Index_20_Link" text:visited-style-name="Index_20_Link"><text:span text:style-name="T6">6.1. <text:s/>Presupuesto de ventas</text:span><text:span text:style-name="T25"><text:tab/>38</text:span></text:a></text:p>
          <text:p text:style-name="P63" loext:marker-style-name="T26"><text:a xlink:type="simple" xlink:href="#_Toc106699186" text:style-name="Index_20_Link" text:visited-style-name="Index_20_Link"><text:span text:style-name="T6">6.2. <text:s/>Presupuesto de costos y gasto</text:span><text:span text:style-name="T25"><text:tab/>39</text:span></text:a></text:p>
          <text:p text:style-name="P63" loext:marker-style-name="T26"><text:a xlink:type="simple" xlink:href="#_Toc106699187" text:style-name="Index_20_Link" text:visited-style-name="Index_20_Link"><text:span text:style-name="T6">6.3. <text:s/>Costos Unitarios</text:span><text:span text:style-name="T25"><text:tab/>41</text:span></text:a></text:p>
          <text:p text:style-name="P63" loext:marker-style-name="T26"><text:a xlink:type="simple" xlink:href="#_Toc106699188" text:style-name="Index_20_Link" text:visited-style-name="Index_20_Link"><text:span text:style-name="T6">6.4. Estado de Resultados</text:span><text:span text:style-name="T25"><text:tab/>41</text:span></text:a></text:p>
          <text:p text:style-name="P63" loext:marker-style-name="T26"><text:a xlink:type="simple" xlink:href="#_Toc106699189" text:style-name="Index_20_Link" text:visited-style-name="Index_20_Link"><text:span text:style-name="T6">6.5. Punto de Equilibrio</text:span><text:span text:style-name="T25"><text:tab/>43</text:span></text:a></text:p>
          <text:p text:style-name="P58" loext:marker-style-name="T26"><text:a xlink:type="simple" xlink:href="#_Toc106699190" text:style-name="Index_20_Link" text:visited-style-name="Index_20_Link"><text:span text:style-name="T6">Capítulo VII. Financiamiento y Costo de Capital</text:span><text:span text:style-name="T25"><text:tab/>43</text:span></text:a></text:p>
          <text:p text:style-name="P63" loext:marker-style-name="T26"><text:a xlink:type="simple" xlink:href="#_Toc106699191" text:style-name="Index_20_Link" text:visited-style-name="Index_20_Link"><text:span text:style-name="T6">7.1. <text:s/>Fuentes de Financiamiento</text:span><text:span text:style-name="T25"><text:tab/>43</text:span></text:a></text:p>
          <text:p text:style-name="P63" loext:marker-style-name="T26"><text:a xlink:type="simple" xlink:href="#_Toc106699192" text:style-name="Index_20_Link" text:visited-style-name="Index_20_Link"><text:span text:style-name="T6">7.2. Financiamiento de Terceros</text:span><text:span text:style-name="T25"><text:tab/>44</text:span></text:a></text:p>
          <text:p text:style-name="P63" loext:marker-style-name="T26"><text:a xlink:type="simple" xlink:href="#_Toc106699193" text:style-name="Index_20_Link" text:visited-style-name="Index_20_Link"><text:span text:style-name="T6">7.3. Costos de Capital Propio (COK)</text:span><text:span text:style-name="T25"><text:tab/>48</text:span></text:a></text:p>
          <text:p text:style-name="P63" loext:marker-style-name="T26"><text:a xlink:type="simple" xlink:href="#_Toc106699194" text:style-name="Index_20_Link" text:visited-style-name="Index_20_Link"><text:span text:style-name="T6">7.4. Costos de Capital Promedio Ponderado (KWACC)</text:span><text:span text:style-name="T25"><text:tab/>48</text:span></text:a></text:p>
          <text:p text:style-name="P58" loext:marker-style-name="T26"><text:a xlink:type="simple" xlink:href="#_Toc106699195" text:style-name="Index_20_Link" text:visited-style-name="Index_20_Link"><text:span text:style-name="T6">Capítulo VIII. Rentabilidad del proyecto</text:span><text:span text:style-name="T25"><text:tab/>49</text:span></text:a></text:p>
          <text:p text:style-name="P63" loext:marker-style-name="T26"><text:a xlink:type="simple" xlink:href="#_Toc106699196" text:style-name="Index_20_Link" text:visited-style-name="Index_20_Link"><text:span text:style-name="T6">8.1. Premisas</text:span><text:span text:style-name="T25"><text:tab/>49</text:span></text:a></text:p>
          <text:p text:style-name="P63" loext:marker-style-name="T26"><text:a xlink:type="simple" xlink:href="#_Toc106699197" text:style-name="Index_20_Link" text:visited-style-name="Index_20_Link"><text:span text:style-name="T6">8.2. Flujo de caja Económico y financiero</text:span><text:span text:style-name="T25"><text:tab/>49</text:span></text:a></text:p>
          <text:p text:style-name="P63" loext:marker-style-name="T26"><text:a xlink:type="simple" xlink:href="#_Toc106699198" text:style-name="Index_20_Link" text:visited-style-name="Index_20_Link"><text:span text:style-name="T6">8.3. Evaluación Económica y Financiera</text:span><text:span text:style-name="T25"><text:tab/>52</text:span></text:a></text:p>
          <text:p text:style-name="P65" loext:marker-style-name="T26"><text:a xlink:type="simple" xlink:href="#_Toc106699199" text:style-name="Index_20_Link" text:visited-style-name="Index_20_Link"><text:span text:style-name="T6">8.3.1. </text:span><text:span text:style-name="T7">T</text:span><text:span text:style-name="T6">asa Interna de Retorno Financiera (TIRF)</text:span><text:span text:style-name="T25"><text:tab/>54</text:span></text:a></text:p>
          <text:p text:style-name="P58" loext:marker-style-name="T26"><text:a xlink:type="simple" xlink:href="#_Toc106699200" text:style-name="Index_20_Link" text:visited-style-name="Index_20_Link"><text:span text:style-name="T6">CONCLUSIONES</text:span><text:span text:style-name="T25"><text:tab/>55</text:span></text:a></text:p>
          <text:p text:style-name="P61" loext:marker-style-name="T11"/>
        </text:index-body>
      </text:table-of-content>
      <text:p text:style-name="P116" loext:marker-style-name="T4"><text:span text:style-name="T4"><text:line-break/></text:span><text:span text:style-name="T4"/></text:p>
      <text:p text:style-name="P131" loext:marker-style-name="T4"/>
      <text:h text:style-name="Heading_20_1" text:outline-level="1" loext:marker-style-name="T4"><text:bookmark-start text:name="_Toc106699112"/><text:span text:style-name="T4">Índice de tablas</text:span><text:bookmark-end text:name="_Toc106699112"/><text:span text:style-name="T4"/></text:h>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66" loext:marker-style-name="T27"><text:a xlink:type="simple" xlink:href="#_Toc106698899" text:style-name="Index_20_Link" text:visited-style-name="Index_20_Link"><text:span text:style-name="T32">Tabla 1</text:span><text:span text:style-name="T25"><text:tab/>12</text:span></text:a></text:p>
          <text:p text:style-name="P66" loext:marker-style-name="T27"><text:a xlink:type="simple" xlink:href="#_Toc106698900" text:style-name="Index_20_Link" text:visited-style-name="Index_20_Link"><text:soft-page-break/><text:span text:style-name="T32">Tabla 2</text:span><text:span text:style-name="T25"><text:tab/>14</text:span></text:a></text:p>
          <text:p text:style-name="P66" loext:marker-style-name="T27"><text:a xlink:type="simple" xlink:href="#_Toc106698901" text:style-name="Index_20_Link" text:visited-style-name="Index_20_Link"><text:span text:style-name="T32">Tabla 3</text:span><text:span text:style-name="T25"><text:tab/>14</text:span></text:a></text:p>
          <text:p text:style-name="P66" loext:marker-style-name="T27"><text:a xlink:type="simple" xlink:href="#_Toc106698902" text:style-name="Index_20_Link" text:visited-style-name="Index_20_Link"><text:span text:style-name="T32">Tabla 4</text:span><text:span text:style-name="T25"><text:tab/>15</text:span></text:a></text:p>
          <text:p text:style-name="P66" loext:marker-style-name="T27"><text:a xlink:type="simple" xlink:href="#_Toc106698903" text:style-name="Index_20_Link" text:visited-style-name="Index_20_Link"><text:span text:style-name="T32">Tabla 5</text:span><text:span text:style-name="T25"><text:tab/>15</text:span></text:a></text:p>
          <text:p text:style-name="P66" loext:marker-style-name="T27"><text:a xlink:type="simple" xlink:href="#_Toc106698904" text:style-name="Index_20_Link" text:visited-style-name="Index_20_Link"><text:span text:style-name="T32">Tabla 6</text:span><text:span text:style-name="T25"><text:tab/>16</text:span></text:a></text:p>
          <text:p text:style-name="P66" loext:marker-style-name="T27"><text:a xlink:type="simple" xlink:href="#_Toc106698905" text:style-name="Index_20_Link" text:visited-style-name="Index_20_Link"><text:span text:style-name="T32">Tabla 7</text:span><text:span text:style-name="T25"><text:tab/>17</text:span></text:a></text:p>
          <text:p text:style-name="P66" loext:marker-style-name="T27"><text:a xlink:type="simple" xlink:href="#_Toc106698906" text:style-name="Index_20_Link" text:visited-style-name="Index_20_Link"><text:span text:style-name="T32">Tabla 8</text:span><text:span text:style-name="T25"><text:tab/>17</text:span></text:a></text:p>
          <text:p text:style-name="P66" loext:marker-style-name="T27"><text:a xlink:type="simple" xlink:href="#_Toc106698907" text:style-name="Index_20_Link" text:visited-style-name="Index_20_Link"><text:span text:style-name="T32">Tabla 9</text:span><text:span text:style-name="T25"><text:tab/>19</text:span></text:a></text:p>
          <text:p text:style-name="P66" loext:marker-style-name="T27"><text:a xlink:type="simple" xlink:href="#_Toc106698908" text:style-name="Index_20_Link" text:visited-style-name="Index_20_Link"><text:span text:style-name="T32">Tabla 10</text:span><text:span text:style-name="T25"><text:tab/>21</text:span></text:a></text:p>
          <text:p text:style-name="P66" loext:marker-style-name="T27"><text:a xlink:type="simple" xlink:href="#_Toc106698909" text:style-name="Index_20_Link" text:visited-style-name="Index_20_Link"><text:span text:style-name="T32">Tabla 11</text:span><text:span text:style-name="T25"><text:tab/>24</text:span></text:a></text:p>
          <text:p text:style-name="P66" loext:marker-style-name="T27"><text:a xlink:type="simple" xlink:href="#_Toc106698910" text:style-name="Index_20_Link" text:visited-style-name="Index_20_Link"><text:span text:style-name="T32">Tabla 12</text:span><text:span text:style-name="T25"><text:tab/>25</text:span></text:a></text:p>
          <text:p text:style-name="P66" loext:marker-style-name="T27"><text:a xlink:type="simple" xlink:href="#_Toc106698911" text:style-name="Index_20_Link" text:visited-style-name="Index_20_Link"><text:span text:style-name="T32">Tabla 13</text:span><text:span text:style-name="T25"><text:tab/>28</text:span></text:a></text:p>
          <text:p text:style-name="P66" loext:marker-style-name="T27"><text:a xlink:type="simple" xlink:href="#_Toc106698912" text:style-name="Index_20_Link" text:visited-style-name="Index_20_Link"><text:span text:style-name="T8">Tabla 14</text:span><text:span text:style-name="T25"><text:tab/>35</text:span></text:a></text:p>
          <text:p text:style-name="P66" loext:marker-style-name="T27"><text:a xlink:type="simple" xlink:href="#_Toc106698913" text:style-name="Index_20_Link" text:visited-style-name="Index_20_Link"><text:span text:style-name="T8">Tabla 15</text:span><text:span text:style-name="T25"><text:tab/>35</text:span></text:a></text:p>
          <text:p text:style-name="P66" loext:marker-style-name="T27"><text:a xlink:type="simple" xlink:href="#_Toc106698914" text:style-name="Index_20_Link" text:visited-style-name="Index_20_Link"><text:span text:style-name="T8">Tabla 16</text:span><text:span text:style-name="T25"><text:tab/>35</text:span></text:a></text:p>
          <text:p text:style-name="P66" loext:marker-style-name="T27"><text:a xlink:type="simple" xlink:href="#_Toc106698915" text:style-name="Index_20_Link" text:visited-style-name="Index_20_Link"><text:span text:style-name="T8">Tabla 17</text:span><text:span text:style-name="T25"><text:tab/>37</text:span></text:a></text:p>
          <text:p text:style-name="P66" loext:marker-style-name="T27"><text:a xlink:type="simple" xlink:href="#_Toc106698916" text:style-name="Index_20_Link" text:visited-style-name="Index_20_Link"><text:span text:style-name="T8">Tabla 18</text:span><text:span text:style-name="T25"><text:tab/>39</text:span></text:a></text:p>
          <text:p text:style-name="P66" loext:marker-style-name="T27"><text:a xlink:type="simple" xlink:href="#_Toc106698917" text:style-name="Index_20_Link" text:visited-style-name="Index_20_Link"><text:span text:style-name="T8">Tabla 19</text:span><text:span text:style-name="T25"><text:tab/>39</text:span></text:a></text:p>
          <text:p text:style-name="P66" loext:marker-style-name="T27"><text:a xlink:type="simple" xlink:href="#_Toc106698918" text:style-name="Index_20_Link" text:visited-style-name="Index_20_Link"><text:span text:style-name="T8">Tabla 20</text:span><text:span text:style-name="T25"><text:tab/>41</text:span></text:a></text:p>
          <text:p text:style-name="P66" loext:marker-style-name="T27"><text:a xlink:type="simple" xlink:href="#_Toc106698919" text:style-name="Index_20_Link" text:visited-style-name="Index_20_Link"><text:span text:style-name="T8">Tabla 21</text:span><text:span text:style-name="T25"><text:tab/>41</text:span></text:a></text:p>
          <text:p text:style-name="P66" loext:marker-style-name="T27"><text:a xlink:type="simple" xlink:href="#_Toc106698920" text:style-name="Index_20_Link" text:visited-style-name="Index_20_Link"><text:span text:style-name="T8">Tabla 22</text:span><text:span text:style-name="T25"><text:tab/>44</text:span></text:a></text:p>
          <text:p text:style-name="P66" loext:marker-style-name="T27"><text:a xlink:type="simple" xlink:href="#_Toc106698921" text:style-name="Index_20_Link" text:visited-style-name="Index_20_Link"><text:span text:style-name="T8">Tabla 23</text:span><text:span text:style-name="T25"><text:tab/>45</text:span></text:a></text:p>
          <text:p text:style-name="P66" loext:marker-style-name="T27"><text:a xlink:type="simple" xlink:href="#_Toc106698922" text:style-name="Index_20_Link" text:visited-style-name="Index_20_Link"><text:span text:style-name="T32">Tabla 24</text:span><text:span text:style-name="T25"><text:tab/>50</text:span></text:a></text:p>
          <text:p text:style-name="P66" loext:marker-style-name="T27"><text:a xlink:type="simple" xlink:href="#_Toc106698923" text:style-name="Index_20_Link" text:visited-style-name="Index_20_Link"><text:span text:style-name="T32">Tabla 25</text:span><text:span text:style-name="T25"><text:tab/>52</text:span></text:a></text:p>
          <text:p text:style-name="P66" loext:marker-style-name="T27"><text:a xlink:type="simple" xlink:href="#_Toc106698924" text:style-name="Index_20_Link" text:visited-style-name="Index_20_Link"><text:span text:style-name="T32">Tabla 26</text:span><text:span text:style-name="T25"><text:tab/>53</text:span></text:a></text:p>
          <text:p text:style-name="P66" loext:marker-style-name="T27"><text:a xlink:type="simple" xlink:href="#_Toc106698925" text:style-name="Index_20_Link" text:visited-style-name="Index_20_Link"><text:span text:style-name="T32">Tabla 27</text:span><text:span text:style-name="T25"><text:tab/>53</text:span></text:a></text:p>
          <text:p text:style-name="P66" loext:marker-style-name="T27"><text:a xlink:type="simple" xlink:href="#_Toc106698926" text:style-name="Index_20_Link" text:visited-style-name="Index_20_Link"><text:span text:style-name="T32">Tabla 28</text:span><text:span text:style-name="T25"><text:tab/>54</text:span></text:a></text:p>
        </text:index-body>
      </text:illustration-index>
      <text:p text:style-name="P131" loext:marker-style-name="T4"/>
      <text:p text:style-name="P131" loext:marker-style-name="T4"/>
      <text:p text:style-name="P131" loext:marker-style-name="T4"/>
      <text:p text:style-name="P131" loext:marker-style-name="T4"><text:soft-page-break/></text:p>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1" loext:marker-style-name="T4"/>
      <text:p text:style-name="P132" loext:marker-style-name="T4"/>
      <text:p text:style-name="P132" loext:marker-style-name="T4"/>
      <text:p text:style-name="P131" loext:marker-style-name="T4"/>
      <text:list text:style-name="WWNum2">
        <text:list-item>
          <text:h text:style-name="P67" text:outline-level="1"><text:bookmark-start text:name="_Toc106699113"/>RESUMEN EJECUTIVO<text:bookmark-end text:name="_Toc106699113"/></text:h>
        </text:list-item>
      </text:list>
      <text:p text:style-name="P116">El presente trabajo es un estudio de mercado, con un horizonte de evaluación de 5 años, de la empresa StampAdek S.A.C. ubicada en la región Ayacucho, este tiene la finalidad de vender polos con estampados personalizados, esta es una microempresa inscrita en el Régimen Especial de Renta.</text:p>
      <text:p text:style-name="P116">La idea de negocio se concibió debido a que en Ayacucho no se tiene empresas con el mismo direccionamiento, y viendo que este tipo de negocio está teniendo buena aceptación por parte del público Ayacuchana, se quiere llegar a este mercado insatisfecho.</text:p>
      <text:p text:style-name="P116">Esta empresa operará mediante la venta de polos con estampados personalizados donde nuestros clientes podrán elegir los diseños en base a su personalidad, gustos y preferencias, además de que se trata de crear identidad cultural.</text:p>
      <text:p text:style-name="P116">La propuesta de valor de nuestro producto es única pues busca brindar a nuestros clientes calidad, exclusividad, identidad y permitirles la cocreación de los diseños.</text:p>
      <text:p text:style-name="P116">El plan de negocios se ha desarrollado de acuerdo con las pautas de la investigación exploratoria descriptiva, siendo la principal fuente de información primaria las encuestas a damas y varones de 20 a 39 años de los distritos de la ciudad de Ayacucho. También se realizó la búsqueda de proveedores de polos identificándolos principalmente en la ciudad de Lima, además de proveedores de servicio de estampado ubicados en nuestra región. </text:p>
      <text:p text:style-name="P116"><text:s/>Acerca de la inversión que se realizará para poner en marcha este proyecto, 5519 soles será financiado con capital propio de los 5 socios y 18000 será financiado con un préstamo. La totalidad de la inversión estará destinada a tangibles por un valor de S/. 10838 y a intangibles por un valor de S/.1116.99. </text:p>
      <text:p text:style-name="P116">Finalmente, el presente plan de negocios ostento un Estado de Resultados con Utilidades Netas positivas desde el primer año de funcionamiento, tendiendo a aumentar especialmente en fechas festivas. Concluimos en que la implementación del negocio de polos con estampados personalizadas en la ciudad de Ayacucho es viable siendo el único beneficiado nuestros clientes.</text:p>
      <text:h text:style-name="P68" text:outline-level="1"><text:bookmark-start text:name="_Toc106699114"/>Capítulo I. – Producto, Modelo y Empresa<text:bookmark-end text:name="_Toc106699114"/> </text:h>
      <text:list text:style-name="WWNum17">
        <text:list-item>
          <text:list>
            <text:list-item>
              <text:h text:style-name="P74" text:outline-level="2"><text:bookmark text:name="_heading=h.3znysh7"/><text:bookmark-start text:name="_Toc106699115"/>Desarrollo del producto o servicio<text:bookmark-end text:name="_Toc106699115"/> </text:h>
              <text:list>
                <text:list-item>
                  <text:h text:style-name="P84" text:outline-level="3"><text:bookmark text:name="_heading=h.2et92p0"/><text:bookmark-start text:name="_Toc106699116"/>Concepto del producto<text:bookmark-end text:name="_Toc106699116"/></text:h>
                </text:list-item>
              </text:list>
            </text:list-item>
          </text:list>
        </text:list-item>
      </text:list>
      <text:p text:style-name="P116" loext:marker-style-name="T35"><text:soft-page-break/><text:span text:style-name="T35">StamAdek ofrecerá la venta y distribución de variados modelos de polos con estampados personalizados como estampados de lugares turísticos de la región, frases motivacionales así también como frases peruanas, fotos tomadas por los clientes en sus <text:s text:c="2"/>viajes, artistas, escritores, libros y películas favoritas de los clientes. </text:span><text:span text:style-name="T35"/></text:p>
      <text:list xml:id="list32343479270054" text:continue-numbering="true" text:style-name="WWNum17">
        <text:list-item>
          <text:list>
            <text:list-item>
              <text:list>
                <text:list-item>
                  <text:h text:style-name="P84" text:outline-level="3"><text:bookmark text:name="_heading=h.3dy6vkm"/><text:bookmark-start text:name="_Toc106699117"/>Análisis FODA<text:bookmark-end text:name="_Toc106699117"/></text:h>
                </text:list-item>
              </text:list>
            </text:list-item>
          </text:list>
        </text:list-item>
      </text:list>
      <table:table table:name="Tabla1" table:style-name="Tabla1">
        <table:table-column table:style-name="Tabla1.A"/>
        <table:table-column table:style-name="Tabla1.B"/>
        <table:table-row table:style-name="Tabla1.1">
          <table:table-cell table:style-name="Tabla1.A1" office:value-type="string">
            <text:p text:style-name="P1" loext:marker-style-name="T36"><text:span text:style-name="T36">FORTALEZAS</text:span><text:span text:style-name="T36"/></text:p>
            <text:p text:style-name="P1" loext:marker-style-name="T36"><text:span text:style-name="T36">Internas/Explótalas</text:span><text:span text:style-name="T36"/></text:p>
          </table:table-cell>
          <table:table-cell table:style-name="Tabla1.A1" office:value-type="string">
            <text:p text:style-name="P1" loext:marker-style-name="T36"><text:span text:style-name="T36">OPORTUNIDAD</text:span><text:span text:style-name="T36"/></text:p>
            <text:p text:style-name="P1" loext:marker-style-name="T36"><text:span text:style-name="T36">Externas/Aprovéchalas</text:span><text:span text:style-name="T36"/></text:p>
          </table:table-cell>
        </table:table-row>
        <table:table-row table:style-name="Tabla1.2">
          <table:table-cell table:style-name="Tabla1.A2" office:value-type="string">
            <text:list text:style-name="WWNum14">
              <text:list-item>
                <text:p text:style-name="P4" loext:marker-style-name="T36"><text:span text:style-name="T36">F1. Participación directa del cliente en el diseño de los estampados para el polo.</text:span><text:span text:style-name="T36"/></text:p>
              </text:list-item>
              <text:list-item>
                <text:p text:style-name="P4" loext:marker-style-name="T36"><text:span text:style-name="T36">F2. <text:s/>Variedad y exclusividad en diseños de polos.</text:span><text:span text:style-name="T36"/></text:p>
              </text:list-item>
              <text:list-item>
                <text:p text:style-name="P4" loext:marker-style-name="T36"><text:span text:style-name="T36">F3. Prendas elaboradas en 100% algodón (20/1) y con calidad de exportación.</text:span><text:span text:style-name="T36"/></text:p>
              </text:list-item>
              <text:list-item>
                <text:p text:style-name="P4" loext:marker-style-name="T36"><text:span text:style-name="T36">F4. Diseños que revaloran el valor cultural de la región.</text:span><text:span text:style-name="T36"/></text:p>
              </text:list-item>
              <text:list-item>
                <text:p text:style-name="P4" loext:marker-style-name="T36"><text:span text:style-name="T36">F5. Producto de fácil transporte.<text:tab/></text:span><text:span text:style-name="T36"/></text:p>
              </text:list-item>
              <text:list-item>
                <text:p text:style-name="P4" loext:marker-style-name="T36"><text:span text:style-name="T36">F6. Entrega delivery.<text:tab/></text:span><text:span text:style-name="T36"/></text:p>
              </text:list-item>
            </text:list>
          </table:table-cell>
          <table:table-cell table:style-name="Tabla1.A2" office:value-type="string">
            <text:list text:style-name="WWNum18">
              <text:list-item>
                <text:p text:style-name="P5" loext:marker-style-name="T36"><text:span text:style-name="T36">Fácil acceso e interacción con los proveedores.</text:span><text:span text:style-name="T36"/></text:p>
              </text:list-item>
              <text:list-item>
                <text:p text:style-name="P5" loext:marker-style-name="T36"><text:span text:style-name="T36">Acceso a internet para venta online.</text:span><text:span text:style-name="T36"/></text:p>
              </text:list-item>
              <text:list-item>
                <text:p text:style-name="P5" loext:marker-style-name="T36"><text:span text:style-name="T36">Avance tecnológico (Maquinaria de fácil uso para el estampado)<text:tab/></text:span><text:span text:style-name="T36"/></text:p>
              </text:list-item>
              <text:list-item>
                <text:p text:style-name="P5" loext:marker-style-name="T36"><text:span text:style-name="T36">Mayor preferencia de la población en el uso de los artículos personalizados.</text:span><text:span text:style-name="T36"/></text:p>
              </text:list-item>
              <text:list-item>
                <text:p text:style-name="P5" loext:marker-style-name="T36"><text:span text:style-name="T36">Región con mucha afluencia turística por las fiestas tradicionales que permite la mayor venta de productos personalizados.</text:span><text:span text:style-name="T36"/></text:p>
              </text:list-item>
              <text:list-item>
                <text:p text:style-name="P5" loext:marker-style-name="T36"><text:span text:style-name="T36">Aprovechar los contextos coyunturales para la realización de los diseños.<text:tab/></text:span><text:span text:style-name="T36"/></text:p>
              </text:list-item>
            </text:list>
          </table:table-cell>
        </table:table-row>
        <table:table-row table:style-name="Tabla1.1">
          <table:table-cell table:style-name="Tabla1.A1" office:value-type="string">
            <text:p text:style-name="P1" loext:marker-style-name="T36"><text:span text:style-name="T36">DEBILIDADES</text:span><text:span text:style-name="T36"/></text:p>
            <text:p text:style-name="P1" loext:marker-style-name="T36"><text:span text:style-name="T36">Internas/ Elimínalas</text:span><text:span text:style-name="T36"/></text:p>
          </table:table-cell>
          <table:table-cell table:style-name="Tabla1.A1" office:value-type="string">
            <text:p text:style-name="P1" loext:marker-style-name="T36"><text:span text:style-name="T36">AMENAZAS</text:span><text:span text:style-name="T36"/></text:p>
            <text:p text:style-name="P1" loext:marker-style-name="T36"><text:span text:style-name="T36">Externas/ Esquívalas</text:span><text:span text:style-name="T36"/></text:p>
          </table:table-cell>
        </table:table-row>
        <table:table-row table:style-name="Tabla1.1">
          <table:table-cell table:style-name="Tabla1.A1" office:value-type="string">
            <text:list text:style-name="WWNum15">
              <text:list-item>
                <text:p text:style-name="P8" loext:marker-style-name="T36"><text:span text:style-name="T36">D1. Visualización del producto de forma virtual, mas no de forma física.</text:span><text:span text:style-name="T36"/></text:p>
              </text:list-item>
              <text:list-item>
                <text:p text:style-name="P8" loext:marker-style-name="T36"><text:span text:style-name="T36">D2. No se cuenta con capital suficiente.<text:tab/></text:span><text:span text:style-name="T36"/></text:p>
              </text:list-item>
              <text:list-item>
                <text:p text:style-name="P8" loext:marker-style-name="T36"><text:span text:style-name="T36">D3. Poca experiencia en ventas por internet.</text:span><text:span text:style-name="T36"/></text:p>
              </text:list-item>
              <text:list-item>
                <text:p text:style-name="P8" loext:marker-style-name="T36"><text:span text:style-name="T36">D4. Limitación en la elaboración de los diseños.<text:tab/></text:span><text:span text:style-name="T36"/></text:p>
              </text:list-item>
              <text:list-item>
                <text:p text:style-name="P8" loext:marker-style-name="T36"><text:span text:style-name="T36">D5. Poca aceptación de los diseños en los productos.<text:tab/><text:tab/><text:tab/></text:span><text:span text:style-name="T36"/></text:p>
              </text:list-item>
            </text:list>
          </table:table-cell>
          <table:table-cell table:style-name="Tabla1.A1" office:value-type="string">
            <text:list text:continue-numbering="true" text:style-name="WWNum15">
              <text:list-item>
                <text:p text:style-name="P8" loext:marker-style-name="T36"><text:span text:style-name="T36">A1. Ingreso de nuevos competidores.<text:tab/></text:span><text:span text:style-name="T36"/></text:p>
              </text:list-item>
              <text:list-item>
                <text:p text:style-name="P8" loext:marker-style-name="T36"><text:span text:style-name="T36">A2. Plagio de diseños por los competidores.<text:tab/></text:span><text:span text:style-name="T36"/></text:p>
              </text:list-item>
              <text:list-item>
                <text:p text:style-name="P8" loext:marker-style-name="T36"><text:span text:style-name="T36">A3. Alza de los precios de las materias primas.</text:span><text:span text:style-name="T36"/></text:p>
              </text:list-item>
              <text:list-item>
                <text:p text:style-name="P8" loext:marker-style-name="T36"><text:span text:style-name="T36">A4. Pérdida o deterioro de las materias primas en el proceso del transporte.<text:tab/></text:span><text:span text:style-name="T36"/></text:p>
              </text:list-item>
              <text:list-item>
                <text:p text:style-name="P8" loext:marker-style-name="T36"><text:span text:style-name="T36">A5. Robo del producto en proceso de envío.<text:tab/><text:tab/><text:tab/></text:span><text:span text:style-name="T36"/></text:p>
              </text:list-item>
            </text:list>
          </table:table-cell>
        </table:table-row>
      </table:table>
      <text:p text:style-name="P116" loext:marker-style-name="T28"><text:span text:style-name="T28">Nota. <text:s/></text:span><text:span text:style-name="T29">Elaboración propia</text:span></text:p>
      <text:list text:continue-list="list32343479270054" text:style-name="WWNum17">
        <text:list-item>
          <text:list>
            <text:list-item>
              <text:h text:style-name="P74" text:outline-level="2"><text:bookmark text:name="_heading=h.1t3h5sf"/><text:bookmark text:name="_heading=h.17dp8vu"/><text:bookmark-start text:name="_Toc106699118"/>Diseño estratégico de la empresa<text:bookmark-end text:name="_Toc106699118"/></text:h>
              <text:list>
                <text:list-item>
                  <text:h text:style-name="P84" text:outline-level="3"><text:bookmark text:name="_heading=h.3rdcrjn"/><text:bookmark-start text:name="_Toc106699119"/>Misión<text:bookmark-end text:name="_Toc106699119"/></text:h>
                </text:list-item>
              </text:list>
            </text:list-item>
          </text:list>
        </text:list-item>
      </text:list>
      <text:p text:style-name="P116" loext:marker-style-name="T35"><text:span text:style-name="T35">Empresa dedicada a la comercialización de camisetas con estampados personalizados dirigidas a satisfacer las necesidades de los clientes exclusivos abarcando su estilo de ver y vivir la vida.</text:span><text:span text:style-name="T35"/></text:p>
      <text:list text:continue-numbering="true" text:style-name="WWNum17">
        <text:list-item>
          <text:list>
            <text:list-item>
              <text:list>
                <text:list-item>
                  <text:h text:style-name="P84" text:outline-level="3"><text:bookmark text:name="_heading=h.26in1rg"/><text:bookmark-start text:name="_Toc106699120"/>Visión<text:bookmark-end text:name="_Toc106699120"/></text:h>
                </text:list-item>
              </text:list>
            </text:list-item>
          </text:list>
        </text:list-item>
      </text:list>
      <text:p text:style-name="P116" loext:marker-style-name="T48"><text:bookmark text:name="_heading=h.lnxbz9"/><text:span text:style-name="T35">Convertirnos en una empresa reconocida en Ayacucho dentro del rubro de polos personalizados por la calidad de sus prendas y exclusividad en el diseño.</text:span><text:span text:style-name="T48"/></text:p>
      <text:list xml:id="list32343851062780" text:continue-numbering="true" text:style-name="WWNum17">
        <text:list-item>
          <text:list>
            <text:list-item>
              <text:list>
                <text:list-item>
                  <text:h text:style-name="P84" text:outline-level="3"><text:bookmark text:name="_heading=h.35nkun2"/><text:bookmark-start text:name="_Toc106699121"/>Objetivos de empresa<text:bookmark-end text:name="_Toc106699121"/></text:h>
                  <text:list>
                    <text:list-item>
                      <text:h text:style-name="P88" text:outline-level="4">En el corto plazo (2021-2022)</text:h>
                    </text:list-item>
                  </text:list>
                </text:list-item>
              </text:list>
            </text:list-item>
          </text:list>
        </text:list-item>
      </text:list>
      <text:list text:style-name="WWNum16">
        <text:list-item>
          <text:p text:style-name="P89">Ofrecer servicios personalizados de diseño gráfico acorde a las exigencias de nuestros potenciales consumidores.</text:p>
        </text:list-item>
        <text:list-item>
          <text:p text:style-name="P89">Lograr que nuestra marca sea reconocida en Facebook.</text:p>
        </text:list-item>
        <text:list-item>
          <text:p text:style-name="P89">Elaborar un plan estratégico para la introducción de polos con motivos de los Carnavales, Semana Santa y el Bicentenario. </text:p>
        </text:list-item>
      </text:list>
      <text:list xml:id="list32343456161793" text:continue-list="list32343851062780" text:style-name="WWNum17">
        <text:list-item>
          <text:list>
            <text:list-item>
              <text:list>
                <text:list-item>
                  <text:list>
                    <text:list-item>
                      <text:h text:style-name="P88" text:outline-level="4">En el mediano plazo (2022-2023)</text:h>
                    </text:list-item>
                  </text:list>
                </text:list-item>
              </text:list>
            </text:list-item>
          </text:list>
        </text:list-item>
      </text:list>
      <text:list text:style-name="WWNum3">
        <text:list-item>
          <text:p text:style-name="P90">Diseñar una plataforma digital donde el cliente pueda diseñar su polo y nuestra empresa encargarse de confeccionarlo.</text:p>
        </text:list-item>
        <text:list-item>
          <text:p text:style-name="P90">Lograr distribuir nuestros polos a los distintos centros comerciales de la región.</text:p>
        </text:list-item>
      </text:list>
      <text:list xml:id="list32343210570875" text:continue-list="list32343456161793" text:style-name="WWNum17">
        <text:list-item>
          <text:list>
            <text:list-item>
              <text:list>
                <text:list-item>
                  <text:list>
                    <text:list-item>
                      <text:h text:style-name="P88" text:outline-level="4">En el largo plazo (5 años)</text:h>
                    </text:list-item>
                  </text:list>
                </text:list-item>
              </text:list>
            </text:list-item>
          </text:list>
        </text:list-item>
      </text:list>
      <text:list text:style-name="WWNum4">
        <text:list-item>
          <text:p text:style-name="P91">Lograr distribuir nuestros polos a los distintos centros comerciales del Perú.</text:p>
        </text:list-item>
        <text:list-item>
          <text:p text:style-name="P91">Contar con nuestra propia planta de confección de polos.</text:p>
        </text:list-item>
        <text:list-item>
          <text:p text:style-name="P91">Asumir nuevas inversiones en nuestro rubro.</text:p>
        </text:list-item>
      </text:list>
      <text:list xml:id="list32344747020209" text:continue-list="list32343210570875" text:style-name="WWNum17">
        <text:list-item>
          <text:list>
            <text:list-item>
              <text:list>
                <text:list-item>
                  <text:h text:style-name="P84" text:outline-level="3"><text:bookmark text:name="_heading=h.1ksv4uv"/><text:bookmark-start text:name="_Toc106699122"/>Estrategias de la empresa<text:bookmark-end text:name="_Toc106699122"/></text:h>
                  <text:list>
                    <text:list-item>
                      <text:h text:style-name="P88" text:outline-level="4">Estrategia de océano azul </text:h>
                    </text:list-item>
                  </text:list>
                </text:list-item>
              </text:list>
            </text:list-item>
          </text:list>
        </text:list-item>
      </text:list>
      <text:p text:style-name="Standard"/>
      <text:p text:style-name="TÍTULO_20_Tablas_20_y_20_Figuras" loext:marker-style-name="T51"><text:bookmark-start text:name="_Toc106698899"/><text:span text:style-name="T51">Tabla </text:span><text:bookmark-end text:name="_Toc106698899"/><text:span text:style-name="T51"><text:sequence text:ref-name="refTable0" text:name="Table" text:formula="ooow:Table+1" style:num-format="1">1</text:sequence></text:span><text:span text:style-name="T51"><text:s/></text:span></text:p>
      <text:p text:style-name="TÍTULO_20_Tablas_20_y_20_Figuras">Estratégico de StampAdek vs Tiendas tradicionales</text:p>
      <table:table table:name="Tabla2" table:style-name="Tabla2">
        <table:table-column table:style-name="Tabla2.A"/>
        <table:table-column table:style-name="Tabla2.B"/>
        <text:soft-page-break/>
        <table:table-row table:style-name="Tabla2.1">
          <table:table-cell table:style-name="Tabla2.A1" office:value-type="string">
            <text:p text:style-name="P13" loext:marker-style-name="T38"><text:span text:style-name="T38">Tiendas tradicionales</text:span><text:span text:style-name="T38"/></text:p>
          </table:table-cell>
          <table:table-cell table:style-name="Tabla2.A1" office:value-type="string">
            <text:p text:style-name="P13" loext:marker-style-name="T38"><text:span text:style-name="T38">StmapAdek</text:span><text:span text:style-name="T38"/></text:p>
          </table:table-cell>
        </table:table-row>
        <table:table-row table:style-name="Tabla2.2">
          <table:table-cell table:style-name="Tabla2.A2" office:value-type="string">
            <text:list xml:id="list790034520" text:style-name="WWNum6">
              <text:list-item>
                <text:p text:style-name="P16" loext:marker-style-name="T36"><text:span text:style-name="T36">Polos con diseños comunes y que no tienen un sentido específico.</text:span><text:span text:style-name="T36"/></text:p>
              </text:list-item>
            </text:list>
            <text:list text:style-name="WWNum5">
              <text:list-item>
                <text:p text:style-name="P17" loext:marker-style-name="T36"><text:span text:style-name="T36">Los clientes no participan de la creación de diseños.</text:span><text:span text:style-name="T36"/></text:p>
              </text:list-item>
              <text:list-item>
                <text:p text:style-name="P17" loext:marker-style-name="T36"><text:span text:style-name="T36">Se realizan estampados, pero al por mayor y no en unidades.</text:span><text:span text:style-name="T36"/></text:p>
              </text:list-item>
              <text:list-item>
                <text:p text:style-name="P17" loext:marker-style-name="T36"><text:span text:style-name="T36">No hacen uso de una plataforma de servicio al cliente.</text:span><text:span text:style-name="T36"/></text:p>
              </text:list-item>
            </text:list>
          </table:table-cell>
          <table:table-cell table:style-name="Tabla2.A2" office:value-type="string">
            <text:p text:style-name="P30" loext:marker-style-name="T36"/>
            <text:list text:continue-numbering="true" text:style-name="WWNum5">
              <text:list-item>
                <text:p text:style-name="P17" loext:marker-style-name="T36"><text:span text:style-name="T36">Polos con diseños que reflejen la identidad cultural.</text:span><text:span text:style-name="T36"/></text:p>
              </text:list-item>
              <text:list-item>
                <text:p text:style-name="P17" loext:marker-style-name="T36"><text:span text:style-name="T36">Los clientes son creadores y cocreadores de los diseños.</text:span><text:span text:style-name="T36"/></text:p>
              </text:list-item>
              <text:list-item>
                <text:p text:style-name="P17" loext:marker-style-name="T36"><text:span text:style-name="T36">Se realizan estampados personalizados y venta unitaria.</text:span><text:span text:style-name="T36"/></text:p>
              </text:list-item>
              <text:list-item>
                <text:p text:style-name="P17" loext:marker-style-name="T36"><text:span text:style-name="T36">Se tendrá una plataforma de servicio al cliente.</text:span><text:span text:style-name="T36"/></text:p>
              </text:list-item>
            </text:list>
          </table:table-cell>
        </table:table-row>
      </table:table>
      <text:p text:style-name="Notas_20_APA"><text:span text:style-name="T50">Nota.</text:span> Elaboración propia</text:p>
      <text:p text:style-name="P116"/>
      <text:p text:style-name="P116"/>
      <text:p text:style-name="P116"><draw:frame draw:style-name="fr10" draw:name="Chart 1875474269" text:anchor-type="char" svg:x="2.506cm" svg:y="0.727cm" svg:width="13.508cm" svg:height="5.741cm" draw:z-index="3"><draw:object xlink:href="./Object 2" xlink:type="simple" xlink:show="embed" xlink:actuate="onLoad"/><draw:image xlink:href="./ObjectReplacements/Object 2" xlink:type="simple" xlink:show="embed" xlink:actuate="onLoad"/></draw:frame></text:p>
      <text:p text:style-name="Notas_20_APA"><text:bookmark text:name="_heading=h.44sinio"/><text:span text:style-name="T50">Nota.</text:span> Elaboración propia</text:p>
      <text:list text:continue-list="list32344747020209" text:style-name="WWNum17">
        <text:list-item>
          <text:h text:style-name="P70" text:outline-level="1"><text:bookmark-start text:name="_Toc106699123"/>Capítulo II.- Estudio del Mercado<text:bookmark-end text:name="_Toc106699123"/></text:h>
          <text:list>
            <text:list-item>
              <text:h text:style-name="P74" text:outline-level="2"><text:bookmark text:name="_heading=h.2jxsxqh"/><text:bookmark-start text:name="_Toc106699124"/>Análisis de mercado<text:bookmark-end text:name="_Toc106699124"/></text:h>
              <text:list>
                <text:list-item>
                  <text:h text:style-name="P84" text:outline-level="3"><text:bookmark text:name="_heading=h.z337ya"/><text:bookmark-start text:name="_Toc106699125"/>Mercado total<text:bookmark-end text:name="_Toc106699125"/></text:h>
                </text:list-item>
              </text:list>
            </text:list-item>
          </text:list>
        </text:list-item>
      </text:list>
      <text:p text:style-name="P116">Nuestro tamaño de mercado o mercado total está compuesto por varones y mujeres cuyo rango de edad es de 20 a 39 años y les gusta comprar polos en general.</text:p>
      <text:list text:continue-numbering="true" text:style-name="WWNum17">
        <text:list-item>
          <text:list>
            <text:list-item>
              <text:list>
                <text:list-item>
                  <text:h text:style-name="P84" text:outline-level="3"><text:bookmark text:name="_heading=h.3j2qqm3"/><text:bookmark-start text:name="_Toc106699126"/>Mercado potencial<text:bookmark-end text:name="_Toc106699126"/></text:h>
                </text:list-item>
              </text:list>
            </text:list-item>
          </text:list>
        </text:list-item>
      </text:list>
      <text:p text:style-name="P116">Según la <text:span text:style-name="T53">pregunta 5</text:span> de la encuesta que se encuentra en la TABLA 4 del ANEXO se muestra que el 87% de las personas encuestadas respondieron que sí compraban polos regularmente antes de la pandemia.</text:p>
      <text:list text:continue-numbering="true" text:style-name="WWNum17">
        <text:list-item>
          <text:list>
            <text:list-item>
              <text:list>
                <text:list-item>
                  <text:h text:style-name="P84" text:outline-level="3"><text:bookmark text:name="_heading=h.1y810tw"/><text:bookmark-start text:name="_Toc106699127"/>Mercado objetivo<text:bookmark-end text:name="_Toc106699127"/></text:h>
                </text:list-item>
              </text:list>
            </text:list-item>
          </text:list>
        </text:list-item>
      </text:list>
      <text:p text:style-name="P116">Vamos a determinar nuestro tamaño de mercado objetivo tomando en consideración nuestro mercado potencial de 87% de personas de un total de 218. Del cual 73 (39%) personas definitivamente sí comprarían polos con estampados personalizados. Por tanto, el 39% de un total de 189 personas serían los clientes efectivos quienes comprarían nuestro producto.</text:p>
      <text:p text:style-name="P116">Estos resultados se visualizan en la TABLA 4 del ANEXO de la <text:span text:style-name="T53">pregunta 7</text:span> de la encuesta.</text:p>
      <text:list xml:id="list32344709658507" text:continue-numbering="true" text:style-name="WWNum17">
        <text:list-item>
          <text:list>
            <text:list-item>
              <text:list>
                <text:list-item>
                  <text:h text:style-name="P84" text:outline-level="3"><text:bookmark text:name="_heading=h.4i7ojhp"/><text:bookmark text:name="_heading=h.2xcytpi"/><text:bookmark-start text:name="_Toc106699128"/>Mercado del consumidor<text:bookmark-end text:name="_Toc106699128"/></text:h>
                </text:list-item>
              </text:list>
            </text:list-item>
          </text:list>
        </text:list-item>
      </text:list>
      <text:p text:style-name="P116"><text:s/>De acuerdo con la encuesta y Focus Groups realizada a los clientes potenciales se obtuvieron los siguientes resultados:</text:p>
      <text:list xml:id="list32343519100279" text:continue-list="list790034520" text:style-name="WWNum6">
        <text:list-item>
          <text:p text:style-name="P92" loext:marker-style-name="T35"><text:span text:style-name="T35">Los consumidores lo primero que observan al comprar su polo es la calidad de la tela luego ven el diseño para después ver el precio y por último la elegancia.</text:span><text:span text:style-name="T35"/></text:p>
        </text:list-item>
      </text:list>
      <text:list text:continue-list="list32344709658507" text:style-name="WWNum17">
        <text:list-item>
          <text:list>
            <text:list-item>
              <text:h text:style-name="P74" text:outline-level="2"><text:bookmark text:name="_heading=h.1ci93xb"/><text:bookmark-start text:name="_Toc106699129"/>Análisis de la demanda<text:bookmark-end text:name="_Toc106699129"/></text:h>
              <text:list>
                <text:list-item>
                  <text:h text:style-name="P84" text:outline-level="3"><text:bookmark text:name="_heading=h.3whwml4"/><text:s/><text:bookmark-start text:name="_Toc106699130"/>Demanda presente<text:bookmark-end text:name="_Toc106699130"/></text:h>
                </text:list-item>
              </text:list>
            </text:list-item>
          </text:list>
        </text:list-item>
      </text:list>
      <text:p text:style-name="P116">Para el análisis de nuestra demanda presente se ha obtenido el consumo per cápita a través de la encuesta realizada. Para los siguientes resultados se ha trabajado con datos del INEI y del MINSA.</text:p>
      <text:p text:style-name="P116">La población entre las edades de 20-39 de los distritos metropolitanos de Ayacucho es el siguiente:</text:p>
      <text:p text:style-name="P116"/>
      <text:p text:style-name="TÍTULO_20_Tablas_20_y_20_Figuras" loext:marker-style-name="T51"><text:bookmark-start text:name="_Toc106698900"/><text:span text:style-name="T51">Tabla </text:span><text:bookmark-end text:name="_Toc106698900"/><text:span text:style-name="T51"><text:sequence text:ref-name="refTable1" text:name="Table" text:formula="ooow:Table+1" style:num-format="1">2</text:sequence></text:span><text:span text:style-name="T51"><text:s/></text:span></text:p>
      <text:p text:style-name="TÍTULO_20_Tablas_20_y_20_Figuras">Tasa de crecimiento de población y el porcentaje de personas no pobres</text:p>
      <table:table table:name="Tabla3" table:style-name="Tabla3">
        <table:table-column table:style-name="Tabla3.A"/>
        <table:table-column table:style-name="Tabla3.B"/>
        <table:table-row table:style-name="Tabla3.1">
          <table:table-cell table:style-name="Tabla3.A1" office:value-type="string">
            <text:p text:style-name="P15" loext:marker-style-name="T36"><text:span text:style-name="T36">Población. Personas entre el rango de edades de 20-39 de los 4 distritos metropolitanos de Huamanga</text:span><text:span text:style-name="T36"/></text:p>
          </table:table-cell>
          <table:table-cell table:style-name="Tabla3.A1" office:value-type="string">
            <text:p text:style-name="P22" loext:marker-style-name="T36"><text:span text:style-name="T36">80801</text:span><text:span text:style-name="T36"/></text:p>
            <text:p text:style-name="P31" loext:marker-style-name="T36"/>
          </table:table-cell>
        </table:table-row>
        <table:table-row table:style-name="Tabla3.2">
          <table:table-cell table:style-name="Tabla3.A2" office:value-type="string">
            <text:p text:style-name="P15" loext:marker-style-name="T36"><text:span text:style-name="T36">% de personas no pobre, fuente (INEI)</text:span><text:span text:style-name="T36"/></text:p>
          </table:table-cell>
          <table:table-cell table:style-name="Tabla3.A2" office:value-type="string">
            <text:p text:style-name="P22" loext:marker-style-name="T36"><text:span text:style-name="T36">60.60%</text:span><text:span text:style-name="T36"/></text:p>
          </table:table-cell>
        </table:table-row>
        <table:table-row table:style-name="Tabla3.3">
          <table:table-cell table:style-name="Tabla3.A2" office:value-type="string">
            <text:p text:style-name="P15" loext:marker-style-name="T36"><text:span text:style-name="T36">Tasa de crecimiento promedio anual de la población, fuente (INEI)</text:span><text:span text:style-name="T36"/></text:p>
          </table:table-cell>
          <table:table-cell table:style-name="Tabla3.A2" office:value-type="string">
            <text:p text:style-name="P22" loext:marker-style-name="T36"><text:span text:style-name="T36">1.30%</text:span><text:span text:style-name="T36"/></text:p>
          </table:table-cell>
        </table:table-row>
        <table:table-row table:style-name="Tabla3.4">
          <table:table-cell table:style-name="Tabla3.A4" office:value-type="string">
            <text:p text:style-name="P15" loext:marker-style-name="T36"><text:span text:style-name="T36">Personas entre 20 y 39 años no pobres</text:span><text:span text:style-name="T36"/></text:p>
          </table:table-cell>
          <table:table-cell table:style-name="Tabla3.A4" office:value-type="string">
            <text:p text:style-name="P22" loext:marker-style-name="T36"><text:span text:style-name="T36">48965</text:span><text:span text:style-name="T36"/></text:p>
          </table:table-cell>
        </table:table-row>
      </table:table>
      <text:p text:style-name="P108"><text:span text:style-name="T50">Nota.</text:span> Para el cálculo de la población los datos que se han obtenido pertenecían al 2015 que tuvo como fuente el MINSA, para ello se ha sacado una tasa de crecimiento y se ha hecho una proyección al 2020, dando como resultado 80801. Los procedimientos de este cálculo se encuentran en la pregunta 9 de la TABLA N°4 del ANEXO.</text:p>
      <text:p text:style-name="P116"><text:soft-page-break/>En base a la <text:span text:style-name="T53">pregunta 9</text:span> de la encuesta se hace el siguiente análisis.</text:p>
      <text:p text:style-name="P116"/>
      <text:p text:style-name="TÍTULO_20_Tablas_20_y_20_Figuras" loext:marker-style-name="T51"><text:bookmark-start text:name="_Toc106698901"/><text:span text:style-name="T51">Tabla </text:span><text:bookmark-end text:name="_Toc106698901"/><text:span text:style-name="T51"><text:sequence text:ref-name="refTable2" text:name="Table" text:formula="ooow:Table+1" style:num-format="1">3</text:sequence></text:span><text:span text:style-name="T51"><text:s/></text:span></text:p>
      <text:p text:style-name="TÍTULO_20_Tablas_20_y_20_Figuras">Frecuencia de consumo de polos personalizados por person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 loext:marker-style-name="T38"><text:span text:style-name="T38">Consumo</text:span><text:span text:style-name="T38"/></text:p>
          </table:table-cell>
          <table:table-cell table:style-name="Tabla4.A1" office:value-type="string">
            <text:p text:style-name="P13" loext:marker-style-name="T38"><text:span text:style-name="T38">Frecuencia</text:span><text:span text:style-name="T38"/></text:p>
          </table:table-cell>
          <table:table-cell table:style-name="Tabla4.A1" office:value-type="string">
            <text:p text:style-name="P13" loext:marker-style-name="T38"><text:span text:style-name="T38">Cantidad</text:span><text:span text:style-name="T38"/></text:p>
          </table:table-cell>
          <table:table-cell table:style-name="Tabla4.A1" office:value-type="string">
            <text:p text:style-name="P13" loext:marker-style-name="T38"><text:span text:style-name="T38">Producto</text:span><text:span text:style-name="T38"/></text:p>
          </table:table-cell>
        </table:table-row>
        <table:table-row table:style-name="Tabla4.1">
          <table:table-cell table:style-name="Tabla4.A2" office:value-type="string">
            <text:p text:style-name="P15" loext:marker-style-name="T36"><text:span text:style-name="T36">Mensual</text:span><text:span text:style-name="T36"/></text:p>
          </table:table-cell>
          <table:table-cell table:style-name="Tabla4.A2" office:value-type="string">
            <text:p text:style-name="P13" loext:marker-style-name="T36"><text:span text:style-name="T36">1</text:span><text:span text:style-name="T36"/></text:p>
          </table:table-cell>
          <table:table-cell table:style-name="Tabla4.A2" office:value-type="string">
            <text:p text:style-name="P13" loext:marker-style-name="T36"><text:span text:style-name="T36">46</text:span><text:span text:style-name="T36"/></text:p>
          </table:table-cell>
          <table:table-cell table:style-name="Tabla4.A2" office:value-type="string">
            <text:p text:style-name="P13" loext:marker-style-name="T36"><text:span text:style-name="T36">46</text:span><text:span text:style-name="T36"/></text:p>
          </table:table-cell>
        </table:table-row>
        <table:table-row table:style-name="Tabla4.1">
          <table:table-cell table:style-name="Tabla4.A2" office:value-type="string">
            <text:p text:style-name="P15" loext:marker-style-name="T36"><text:span text:style-name="T36">Trimestral</text:span><text:span text:style-name="T36"/></text:p>
          </table:table-cell>
          <table:table-cell table:style-name="Tabla4.A2" office:value-type="string">
            <text:p text:style-name="P13" loext:marker-style-name="T36"><text:span text:style-name="T36">4</text:span><text:span text:style-name="T36"/></text:p>
          </table:table-cell>
          <table:table-cell table:style-name="Tabla4.A2" office:value-type="string">
            <text:p text:style-name="P13" loext:marker-style-name="T36"><text:span text:style-name="T36">47</text:span><text:span text:style-name="T36"/></text:p>
          </table:table-cell>
          <table:table-cell table:style-name="Tabla4.A2" office:value-type="string">
            <text:p text:style-name="P13" loext:marker-style-name="T36"><text:span text:style-name="T36">188</text:span><text:span text:style-name="T36"/></text:p>
          </table:table-cell>
        </table:table-row>
        <table:table-row table:style-name="Tabla4.1">
          <table:table-cell table:style-name="Tabla4.A2" office:value-type="string">
            <text:p text:style-name="P15" loext:marker-style-name="T36"><text:span text:style-name="T36">Semestral</text:span><text:span text:style-name="T36"/></text:p>
          </table:table-cell>
          <table:table-cell table:style-name="Tabla4.A2" office:value-type="string">
            <text:p text:style-name="P13" loext:marker-style-name="T36"><text:span text:style-name="T36">6</text:span><text:span text:style-name="T36"/></text:p>
          </table:table-cell>
          <table:table-cell table:style-name="Tabla4.A2" office:value-type="string">
            <text:p text:style-name="P13" loext:marker-style-name="T36"><text:span text:style-name="T36">48</text:span><text:span text:style-name="T36"/></text:p>
          </table:table-cell>
          <table:table-cell table:style-name="Tabla4.A2" office:value-type="string">
            <text:p text:style-name="P13" loext:marker-style-name="T36"><text:span text:style-name="T36">288</text:span><text:span text:style-name="T36"/></text:p>
          </table:table-cell>
        </table:table-row>
        <table:table-row table:style-name="Tabla4.1">
          <table:table-cell table:style-name="Tabla4.A5" office:value-type="string">
            <text:p text:style-name="P15" loext:marker-style-name="T36"><text:span text:style-name="T36">Anual</text:span><text:span text:style-name="T36"/></text:p>
          </table:table-cell>
          <table:table-cell table:style-name="Tabla4.A5" office:value-type="string">
            <text:p text:style-name="P13" loext:marker-style-name="T36"><text:span text:style-name="T36">12</text:span><text:span text:style-name="T36"/></text:p>
          </table:table-cell>
          <table:table-cell table:style-name="Tabla4.A5" office:value-type="string">
            <text:p text:style-name="P13" loext:marker-style-name="T36"><text:span text:style-name="T36">48</text:span><text:span text:style-name="T36"/></text:p>
          </table:table-cell>
          <table:table-cell table:style-name="Tabla4.A5" office:value-type="string">
            <text:p text:style-name="P13" loext:marker-style-name="T36"><text:span text:style-name="T36">576</text:span><text:span text:style-name="T36"/></text:p>
          </table:table-cell>
        </table:table-row>
        <table:table-row table:style-name="Tabla4.1">
          <table:table-cell table:style-name="Tabla4.A1" office:value-type="string">
            <text:p text:style-name="P15" loext:marker-style-name="T38"><text:span text:style-name="T38">Total</text:span><text:span text:style-name="T38"/></text:p>
          </table:table-cell>
          <table:table-cell table:style-name="Tabla4.A1" office:value-type="string">
            <text:p text:style-name="P33" loext:marker-style-name="T38"/>
          </table:table-cell>
          <table:table-cell table:style-name="Tabla4.A1" office:value-type="string">
            <text:p text:style-name="P13" loext:marker-style-name="T38"><text:span text:style-name="T38">189</text:span><text:span text:style-name="T38"/></text:p>
          </table:table-cell>
          <table:table-cell table:style-name="Tabla4.A1" office:value-type="string">
            <text:p text:style-name="P13" loext:marker-style-name="T38"><text:span text:style-name="T38">1098</text:span><text:span text:style-name="T38"/></text:p>
          </table:table-cell>
        </table:table-row>
      </table:table>
      <text:p text:style-name="Notas_20_APA" loext:marker-style-name="T55"><text:span text:style-name="T50">Nota.</text:span> Encuestas<text:span text:style-name="T55">, </text:span>equipo de trabajo</text:p>
      <text:p text:style-name="P116"/>
      <text:p text:style-name="P116">La siguiente tabla 2-4 está en base a la <text:span text:style-name="T53">pregunta 10</text:span> de la encuesta donde la frecuencia promedio de compra de polos es de 6 meses.</text:p>
      <text:p text:style-name="TÍTULO_20_Tablas_20_y_20_Figuras" loext:marker-style-name="T51"><text:bookmark-start text:name="_Toc106698902"/><text:span text:style-name="T51">Tabla </text:span><text:bookmark-end text:name="_Toc106698902"/><text:span text:style-name="T51"><text:sequence text:ref-name="refTable3" text:name="Table" text:formula="ooow:Table+1" style:num-format="1">4</text:sequence></text:span><text:span text:style-name="T51"><text:s/></text:span></text:p>
      <text:p text:style-name="TÍTULO_20_Tablas_20_y_20_Figuras">Consumo mensual</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3" loext:marker-style-name="T38"><text:span text:style-name="T38">Consumo (Unidades)</text:span><text:span text:style-name="T38"/></text:p>
          </table:table-cell>
          <table:table-cell table:style-name="Tabla5.A1" office:value-type="string">
            <text:p text:style-name="P23" loext:marker-style-name="T38"><text:span text:style-name="T38">Cantidad</text:span><text:span text:style-name="T38"/></text:p>
          </table:table-cell>
          <table:table-cell table:style-name="Tabla5.A1" office:value-type="string">
            <text:p text:style-name="P23" loext:marker-style-name="T38"><text:span text:style-name="T38">Producto</text:span><text:span text:style-name="T38"/></text:p>
          </table:table-cell>
        </table:table-row>
        <table:table-row table:style-name="Tabla5.1">
          <table:table-cell table:style-name="Tabla5.A2" office:value-type="string">
            <text:p text:style-name="P23" loext:marker-style-name="T36"><text:span text:style-name="T36">0</text:span><text:span text:style-name="T36"/></text:p>
          </table:table-cell>
          <table:table-cell table:style-name="Tabla5.A2" office:value-type="string">
            <text:p text:style-name="P23" loext:marker-style-name="T36"><text:span text:style-name="T36">16</text:span><text:span text:style-name="T36"/></text:p>
          </table:table-cell>
          <table:table-cell table:style-name="Tabla5.A2" office:value-type="string">
            <text:p text:style-name="P23" loext:marker-style-name="T36"><text:span text:style-name="T36">0</text:span><text:span text:style-name="T36"/></text:p>
          </table:table-cell>
        </table:table-row>
        <table:table-row table:style-name="Tabla5.1">
          <table:table-cell table:style-name="Tabla5.A2" office:value-type="string">
            <text:p text:style-name="P23" loext:marker-style-name="T36"><text:span text:style-name="T36">1</text:span><text:span text:style-name="T36"/></text:p>
          </table:table-cell>
          <table:table-cell table:style-name="Tabla5.A2" office:value-type="string">
            <text:p text:style-name="P23" loext:marker-style-name="T36"><text:span text:style-name="T36">30</text:span><text:span text:style-name="T36"/></text:p>
          </table:table-cell>
          <table:table-cell table:style-name="Tabla5.A2" office:value-type="string">
            <text:p text:style-name="P23" loext:marker-style-name="T36"><text:span text:style-name="T36">30</text:span><text:span text:style-name="T36"/></text:p>
          </table:table-cell>
        </table:table-row>
        <table:table-row table:style-name="Tabla5.1">
          <table:table-cell table:style-name="Tabla5.A2" office:value-type="string">
            <text:p text:style-name="P23" loext:marker-style-name="T36"><text:span text:style-name="T36">2</text:span><text:span text:style-name="T36"/></text:p>
          </table:table-cell>
          <table:table-cell table:style-name="Tabla5.A2" office:value-type="string">
            <text:p text:style-name="P23" loext:marker-style-name="T36"><text:span text:style-name="T36">22</text:span><text:span text:style-name="T36"/></text:p>
          </table:table-cell>
          <table:table-cell table:style-name="Tabla5.A2" office:value-type="string">
            <text:p text:style-name="P23" loext:marker-style-name="T36"><text:span text:style-name="T36">44</text:span><text:span text:style-name="T36"/></text:p>
          </table:table-cell>
        </table:table-row>
        <table:table-row table:style-name="Tabla5.1">
          <table:table-cell table:style-name="Tabla5.A2" office:value-type="string">
            <text:p text:style-name="P23" loext:marker-style-name="T36"><text:span text:style-name="T36">3</text:span><text:span text:style-name="T36"/></text:p>
          </table:table-cell>
          <table:table-cell table:style-name="Tabla5.A2" office:value-type="string">
            <text:p text:style-name="P23" loext:marker-style-name="T36"><text:span text:style-name="T36">41</text:span><text:span text:style-name="T36"/></text:p>
          </table:table-cell>
          <table:table-cell table:style-name="Tabla5.A2" office:value-type="string">
            <text:p text:style-name="P23" loext:marker-style-name="T36"><text:span text:style-name="T36">123</text:span><text:span text:style-name="T36"/></text:p>
          </table:table-cell>
        </table:table-row>
        <table:table-row table:style-name="Tabla5.1">
          <table:table-cell table:style-name="Tabla5.A2" office:value-type="string">
            <text:p text:style-name="P23" loext:marker-style-name="T36"><text:span text:style-name="T36">4</text:span><text:span text:style-name="T36"/></text:p>
          </table:table-cell>
          <table:table-cell table:style-name="Tabla5.A2" office:value-type="string">
            <text:p text:style-name="P23" loext:marker-style-name="T36"><text:span text:style-name="T36">23</text:span><text:span text:style-name="T36"/></text:p>
          </table:table-cell>
          <table:table-cell table:style-name="Tabla5.A2" office:value-type="string">
            <text:p text:style-name="P23" loext:marker-style-name="T36"><text:span text:style-name="T36">92</text:span><text:span text:style-name="T36"/></text:p>
          </table:table-cell>
        </table:table-row>
        <table:table-row table:style-name="Tabla5.1">
          <table:table-cell table:style-name="Tabla5.A2" office:value-type="string">
            <text:p text:style-name="P23" loext:marker-style-name="T36"><text:span text:style-name="T36">5</text:span><text:span text:style-name="T36"/></text:p>
          </table:table-cell>
          <table:table-cell table:style-name="Tabla5.A2" office:value-type="string">
            <text:p text:style-name="P23" loext:marker-style-name="T36"><text:span text:style-name="T36">35</text:span><text:span text:style-name="T36"/></text:p>
          </table:table-cell>
          <table:table-cell table:style-name="Tabla5.A2" office:value-type="string">
            <text:p text:style-name="P23" loext:marker-style-name="T36"><text:span text:style-name="T36">175</text:span><text:span text:style-name="T36"/></text:p>
          </table:table-cell>
        </table:table-row>
        <table:table-row table:style-name="Tabla5.1">
          <table:table-cell table:style-name="Tabla5.A8" office:value-type="string">
            <text:p text:style-name="P23" loext:marker-style-name="T36"><text:span text:style-name="T36">6</text:span><text:span text:style-name="T36"/></text:p>
          </table:table-cell>
          <table:table-cell table:style-name="Tabla5.A8" office:value-type="string">
            <text:p text:style-name="P23" loext:marker-style-name="T36"><text:span text:style-name="T36">22</text:span><text:span text:style-name="T36"/></text:p>
          </table:table-cell>
          <table:table-cell table:style-name="Tabla5.A8" office:value-type="string">
            <text:p text:style-name="P23" loext:marker-style-name="T36"><text:span text:style-name="T36">132</text:span><text:span text:style-name="T36"/></text:p>
          </table:table-cell>
        </table:table-row>
        <table:table-row table:style-name="Tabla5.1">
          <table:table-cell table:style-name="Tabla5.A1" office:value-type="string">
            <text:p text:style-name="P23" loext:marker-style-name="T38"><text:span text:style-name="T38">Total</text:span><text:span text:style-name="T38"/></text:p>
          </table:table-cell>
          <table:table-cell table:style-name="Tabla5.A1" office:value-type="string">
            <text:p text:style-name="P23" loext:marker-style-name="T38"><text:span text:style-name="T38">189</text:span><text:span text:style-name="T38"/></text:p>
          </table:table-cell>
          <table:table-cell table:style-name="Tabla5.A1" office:value-type="string">
            <text:p text:style-name="P23" loext:marker-style-name="T38"><text:span text:style-name="T38">596</text:span><text:span text:style-name="T38"/></text:p>
          </table:table-cell>
        </table:table-row>
      </table:table>
      <text:p text:style-name="Notas_20_APA" loext:marker-style-name="T55"><text:span text:style-name="T50">Nota</text:span>. Encuestas<text:span text:style-name="T55">, </text:span>equipo de trabajo</text:p>
      <text:p text:style-name="P116"/>
      <text:list text:continue-numbering="true" text:style-name="WWNum17">
        <text:list-item>
          <text:list>
            <text:list-item>
              <text:list>
                <text:list-item>
                  <text:h text:style-name="P84" text:outline-level="3"><text:bookmark text:name="_heading=h.2bn6wsx"/><text:s/><text:bookmark-start text:name="_Toc106699131"/>Demanda Futura<text:bookmark-end text:name="_Toc106699131"/></text:h>
                </text:list-item>
              </text:list>
            </text:list-item>
          </text:list>
        </text:list-item>
      </text:list>
      <text:p text:style-name="P116"><text:s text:c="7"/>Consumo personal en unidades es 3 posterior a ello se hizo la operación de regla de simples y se obtuvo como consumo per cápita 7 unidades al año por persona.</text:p>
      <text:p text:style-name="TÍTULO_20_Tablas_20_y_20_Figuras" loext:marker-style-name="T51"><text:bookmark-start text:name="_Toc106698903"/><text:span text:style-name="T51">Tabla </text:span><text:bookmark-end text:name="_Toc106698903"/><text:span text:style-name="T51"><text:sequence text:ref-name="refTable4" text:name="Table" text:formula="ooow:Table+1" style:num-format="1">5</text:sequence></text:span><text:span text:style-name="T51"><text:s/></text:span></text:p>
      <text:p text:style-name="TÍTULO_20_Tablas_20_y_20_Figuras">Demanda potencial del mercado proyectado para el horizonte de evaluación.</text:p>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P13" loext:marker-style-name="T38"><text:span text:style-name="T38">Año</text:span><text:span text:style-name="T38"/></text:p>
          </table:table-cell>
          <table:table-cell table:style-name="Tabla6.A1" office:value-type="string">
            <text:p text:style-name="P15" loext:marker-style-name="T38"><text:span text:style-name="T38">Número de personas potenciales </text:span><text:span text:style-name="T38"/></text:p>
          </table:table-cell>
          <table:table-cell table:style-name="Tabla6.A1" office:value-type="string">
            <text:p text:style-name="P15" loext:marker-style-name="T38"><text:span text:style-name="T38">Consumo per cápita al año</text:span><text:span text:style-name="T38"/></text:p>
          </table:table-cell>
          <table:table-cell table:style-name="Tabla6.A1" office:value-type="string">
            <text:p text:style-name="P15" loext:marker-style-name="T38"><text:span text:style-name="T38">Demanda Potencial </text:span><text:span text:style-name="T38"/></text:p>
          </table:table-cell>
        </table:table-row>
        <table:table-row table:style-name="Tabla6.2">
          <table:table-cell table:style-name="Tabla6.A2" office:value-type="string">
            <text:p text:style-name="P13" loext:marker-style-name="T36"><text:span text:style-name="T36">0</text:span><text:span text:style-name="T36"/></text:p>
          </table:table-cell>
          <table:table-cell table:style-name="Tabla6.A2" office:value-type="string">
            <text:p text:style-name="P13" loext:marker-style-name="T36"><text:span text:style-name="T36">42600</text:span><text:span text:style-name="T36"/></text:p>
          </table:table-cell>
          <table:table-cell table:style-name="Tabla6.A2" office:value-type="string">
            <text:p text:style-name="P13" loext:marker-style-name="T36"><text:span text:style-name="T36">7</text:span><text:span text:style-name="T36"/></text:p>
          </table:table-cell>
          <table:table-cell table:style-name="Tabla6.A2" office:value-type="string">
            <text:p text:style-name="P13" loext:marker-style-name="T36"><text:span text:style-name="T36">277481</text:span><text:span text:style-name="T36"/></text:p>
          </table:table-cell>
        </table:table-row>
        <table:table-row table:style-name="Tabla6.2">
          <table:table-cell table:style-name="Tabla6.A2" office:value-type="string">
            <text:p text:style-name="P13" loext:marker-style-name="T36"><text:span text:style-name="T36">1</text:span><text:span text:style-name="T36"/></text:p>
          </table:table-cell>
          <table:table-cell table:style-name="Tabla6.A2" office:value-type="string">
            <text:p text:style-name="P13" loext:marker-style-name="T36"><text:span text:style-name="T36">43154</text:span><text:span text:style-name="T36"/></text:p>
          </table:table-cell>
          <table:table-cell table:style-name="Tabla6.A2" office:value-type="string">
            <text:p text:style-name="P13" loext:marker-style-name="T36"><text:span text:style-name="T36">7</text:span><text:span text:style-name="T36"/></text:p>
          </table:table-cell>
          <table:table-cell table:style-name="Tabla6.A2" office:value-type="string">
            <text:p text:style-name="P13" loext:marker-style-name="T36"><text:span text:style-name="T36">281089</text:span><text:span text:style-name="T36"/></text:p>
          </table:table-cell>
        </table:table-row>
        <table:table-row table:style-name="Tabla6.2">
          <table:table-cell table:style-name="Tabla6.A2" office:value-type="string">
            <text:p text:style-name="P13" loext:marker-style-name="T36"><text:span text:style-name="T36">2</text:span><text:span text:style-name="T36"/></text:p>
          </table:table-cell>
          <table:table-cell table:style-name="Tabla6.A2" office:value-type="string">
            <text:p text:style-name="P13" loext:marker-style-name="T36"><text:span text:style-name="T36">43715</text:span><text:span text:style-name="T36"/></text:p>
          </table:table-cell>
          <table:table-cell table:style-name="Tabla6.A2" office:value-type="string">
            <text:p text:style-name="P13" loext:marker-style-name="T36"><text:span text:style-name="T36">7</text:span><text:span text:style-name="T36"/></text:p>
          </table:table-cell>
          <table:table-cell table:style-name="Tabla6.A2" office:value-type="string">
            <text:p text:style-name="P13" loext:marker-style-name="T36"><text:span text:style-name="T36">284743</text:span><text:span text:style-name="T36"/></text:p>
          </table:table-cell>
        </table:table-row>
        <table:table-row table:style-name="Tabla6.2">
          <table:table-cell table:style-name="Tabla6.A2" office:value-type="string">
            <text:p text:style-name="P13" loext:marker-style-name="T36"><text:span text:style-name="T36">3</text:span><text:span text:style-name="T36"/></text:p>
          </table:table-cell>
          <table:table-cell table:style-name="Tabla6.A2" office:value-type="string">
            <text:p text:style-name="P13" loext:marker-style-name="T36"><text:span text:style-name="T36">44283</text:span><text:span text:style-name="T36"/></text:p>
          </table:table-cell>
          <table:table-cell table:style-name="Tabla6.A2" office:value-type="string">
            <text:p text:style-name="P13" loext:marker-style-name="T36"><text:span text:style-name="T36">7</text:span><text:span text:style-name="T36"/></text:p>
          </table:table-cell>
          <table:table-cell table:style-name="Tabla6.A2" office:value-type="string">
            <text:p text:style-name="P13" loext:marker-style-name="T36"><text:span text:style-name="T36">288444</text:span><text:span text:style-name="T36"/></text:p>
          </table:table-cell>
        </table:table-row>
        <table:table-row table:style-name="Tabla6.2">
          <table:table-cell table:style-name="Tabla6.A2" office:value-type="string">
            <text:p text:style-name="P13" loext:marker-style-name="T36"><text:span text:style-name="T36">4</text:span><text:span text:style-name="T36"/></text:p>
          </table:table-cell>
          <table:table-cell table:style-name="Tabla6.A2" office:value-type="string">
            <text:p text:style-name="P13" loext:marker-style-name="T36"><text:span text:style-name="T36">44859</text:span><text:span text:style-name="T36"/></text:p>
          </table:table-cell>
          <table:table-cell table:style-name="Tabla6.A2" office:value-type="string">
            <text:p text:style-name="P13" loext:marker-style-name="T36"><text:span text:style-name="T36">7</text:span><text:span text:style-name="T36"/></text:p>
          </table:table-cell>
          <table:table-cell table:style-name="Tabla6.A2" office:value-type="string">
            <text:p text:style-name="P13" loext:marker-style-name="T36"><text:span text:style-name="T36">292194</text:span><text:span text:style-name="T36"/></text:p>
          </table:table-cell>
        </table:table-row>
        <table:table-row table:style-name="Tabla6.2">
          <table:table-cell table:style-name="Tabla6.A7" office:value-type="string">
            <text:p text:style-name="P13" loext:marker-style-name="T36"><text:span text:style-name="T36">5</text:span><text:span text:style-name="T36"/></text:p>
          </table:table-cell>
          <table:table-cell table:style-name="Tabla6.A7" office:value-type="string">
            <text:p text:style-name="P13" loext:marker-style-name="T36"><text:span text:style-name="T36">45442</text:span><text:span text:style-name="T36"/></text:p>
          </table:table-cell>
          <table:table-cell table:style-name="Tabla6.A7" office:value-type="string">
            <text:p text:style-name="P13" loext:marker-style-name="T36"><text:span text:style-name="T36">7</text:span><text:span text:style-name="T36"/></text:p>
          </table:table-cell>
          <table:table-cell table:style-name="Tabla6.A7" office:value-type="string">
            <text:p text:style-name="P13" loext:marker-style-name="T36"><text:span text:style-name="T36">295993</text:span><text:span text:style-name="T36"/></text:p>
          </table:table-cell>
        </table:table-row>
      </table:table>
      <text:p text:style-name="Notas_20_APA"><text:span text:style-name="T50">Nota.</text:span> Equipo de trabajo</text:p>
      <text:p text:style-name="P118"/>
      <text:p text:style-name="TÍTULO_20_Tablas_20_y_20_Figuras" loext:marker-style-name="T51"><text:bookmark-start text:name="_Toc106698904"/><text:span text:style-name="T51">Tabla </text:span><text:bookmark-end text:name="_Toc106698904"/><text:span text:style-name="T51"><text:sequence text:ref-name="refTable5" text:name="Table" text:formula="ooow:Table+1" style:num-format="1">6</text:sequence></text:span><text:span text:style-name="T51"><text:s/></text:span></text:p>
      <text:p text:style-name="TÍTULO_20_Tablas_20_y_20_Figuras">Demanda objetivo proyectado que enfrentará el proyecto.</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13" loext:marker-style-name="T38"><text:span text:style-name="T38">Año</text:span><text:span text:style-name="T38"/></text:p>
          </table:table-cell>
          <table:table-cell table:style-name="Tabla7.A1" office:value-type="string">
            <text:p text:style-name="P15" loext:marker-style-name="T38"><text:span text:style-name="T38">Número de personas con intención de compras</text:span><text:span text:style-name="T38"/></text:p>
          </table:table-cell>
          <table:table-cell table:style-name="Tabla7.A1" table:number-columns-spanned="2" office:value-type="string">
            <text:p text:style-name="P15" loext:marker-style-name="T38"><text:span text:style-name="T38">Consumo per cápita</text:span><text:span text:style-name="T38"/></text:p>
          </table:table-cell>
          <table:covered-table-cell/>
          <table:table-cell table:style-name="Tabla7.A1" table:number-columns-spanned="2" office:value-type="string">
            <text:p text:style-name="P15" loext:marker-style-name="T38"><text:span text:style-name="T38">Demanda objetivo</text:span><text:span text:style-name="T38"/></text:p>
          </table:table-cell>
          <table:covered-table-cell/>
        </table:table-row>
        <table:table-row table:style-name="Tabla7.2">
          <table:table-cell table:style-name="Tabla7.A2" office:value-type="string">
            <text:p text:style-name="P13" loext:marker-style-name="T36"><text:span text:style-name="T36">0</text:span><text:span text:style-name="T36"/></text:p>
          </table:table-cell>
          <table:table-cell table:style-name="Tabla7.A2" table:number-columns-spanned="2" office:value-type="string">
            <text:p text:style-name="P13" loext:marker-style-name="T36"><text:span text:style-name="T36">16614</text:span><text:span text:style-name="T36"/></text:p>
          </table:table-cell>
          <table:covered-table-cell/>
          <table:table-cell table:style-name="Tabla7.A2" table:number-columns-spanned="2" office:value-type="string">
            <text:p text:style-name="P13" loext:marker-style-name="T36"><text:span text:style-name="T36">7</text:span><text:span text:style-name="T36"/></text:p>
          </table:table-cell>
          <table:covered-table-cell/>
          <table:table-cell table:style-name="Tabla7.A2" office:value-type="string">
            <text:p text:style-name="P13" loext:marker-style-name="T36"><text:span text:style-name="T36">108218</text:span><text:span text:style-name="T36"/></text:p>
          </table:table-cell>
        </table:table-row>
        <table:table-row table:style-name="Tabla7.2">
          <table:table-cell table:style-name="Tabla7.A2" office:value-type="string">
            <text:p text:style-name="P13" loext:marker-style-name="T36"><text:span text:style-name="T36">1</text:span><text:span text:style-name="T36"/></text:p>
          </table:table-cell>
          <table:table-cell table:style-name="Tabla7.A2" table:number-columns-spanned="2" office:value-type="string">
            <text:p text:style-name="P13" loext:marker-style-name="T36"><text:span text:style-name="T36">16830</text:span><text:span text:style-name="T36"/></text:p>
          </table:table-cell>
          <table:covered-table-cell/>
          <table:table-cell table:style-name="Tabla7.A2" table:number-columns-spanned="2" office:value-type="string">
            <text:p text:style-name="P13" loext:marker-style-name="T36"><text:span text:style-name="T36">7</text:span><text:span text:style-name="T36"/></text:p>
          </table:table-cell>
          <table:covered-table-cell/>
          <table:table-cell table:style-name="Tabla7.A2" office:value-type="string">
            <text:p text:style-name="P13" loext:marker-style-name="T36"><text:span text:style-name="T36">109625</text:span><text:span text:style-name="T36"/></text:p>
          </table:table-cell>
        </table:table-row>
        <table:table-row table:style-name="Tabla7.2">
          <table:table-cell table:style-name="Tabla7.A2" office:value-type="string">
            <text:p text:style-name="P13" loext:marker-style-name="T36"><text:span text:style-name="T36">2</text:span><text:span text:style-name="T36"/></text:p>
          </table:table-cell>
          <table:table-cell table:style-name="Tabla7.A2" table:number-columns-spanned="2" office:value-type="string">
            <text:p text:style-name="P13" loext:marker-style-name="T36"><text:span text:style-name="T36">17049</text:span><text:span text:style-name="T36"/></text:p>
          </table:table-cell>
          <table:covered-table-cell/>
          <table:table-cell table:style-name="Tabla7.A2" table:number-columns-spanned="2" office:value-type="string">
            <text:p text:style-name="P13" loext:marker-style-name="T36"><text:span text:style-name="T36">7</text:span><text:span text:style-name="T36"/></text:p>
          </table:table-cell>
          <table:covered-table-cell/>
          <table:table-cell table:style-name="Tabla7.A2" office:value-type="string">
            <text:p text:style-name="P13" loext:marker-style-name="T36"><text:span text:style-name="T36">111050</text:span><text:span text:style-name="T36"/></text:p>
          </table:table-cell>
        </table:table-row>
        <table:table-row table:style-name="Tabla7.2">
          <table:table-cell table:style-name="Tabla7.A2" office:value-type="string">
            <text:p text:style-name="P13" loext:marker-style-name="T36"><text:span text:style-name="T36">3</text:span><text:span text:style-name="T36"/></text:p>
          </table:table-cell>
          <table:table-cell table:style-name="Tabla7.A2" table:number-columns-spanned="2" office:value-type="string">
            <text:p text:style-name="P13" loext:marker-style-name="T36"><text:span text:style-name="T36">17270</text:span><text:span text:style-name="T36"/></text:p>
          </table:table-cell>
          <table:covered-table-cell/>
          <table:table-cell table:style-name="Tabla7.A2" table:number-columns-spanned="2" office:value-type="string">
            <text:p text:style-name="P13" loext:marker-style-name="T36"><text:span text:style-name="T36">7</text:span><text:span text:style-name="T36"/></text:p>
          </table:table-cell>
          <table:covered-table-cell/>
          <table:table-cell table:style-name="Tabla7.A2" office:value-type="string">
            <text:p text:style-name="P13" loext:marker-style-name="T36"><text:span text:style-name="T36">112493</text:span><text:span text:style-name="T36"/></text:p>
          </table:table-cell>
        </table:table-row>
        <table:table-row table:style-name="Tabla7.2">
          <table:table-cell table:style-name="Tabla7.A2" office:value-type="string">
            <text:p text:style-name="P13" loext:marker-style-name="T36"><text:span text:style-name="T36">4</text:span><text:span text:style-name="T36"/></text:p>
          </table:table-cell>
          <table:table-cell table:style-name="Tabla7.A2" table:number-columns-spanned="2" office:value-type="string">
            <text:p text:style-name="P13" loext:marker-style-name="T36"><text:span text:style-name="T36">17495</text:span><text:span text:style-name="T36"/></text:p>
          </table:table-cell>
          <table:covered-table-cell/>
          <table:table-cell table:style-name="Tabla7.A2" table:number-columns-spanned="2" office:value-type="string">
            <text:p text:style-name="P13" loext:marker-style-name="T36"><text:span text:style-name="T36">7</text:span><text:span text:style-name="T36"/></text:p>
          </table:table-cell>
          <table:covered-table-cell/>
          <table:table-cell table:style-name="Tabla7.A2" office:value-type="string">
            <text:p text:style-name="P13" loext:marker-style-name="T36"><text:span text:style-name="T36">113956</text:span><text:span text:style-name="T36"/></text:p>
          </table:table-cell>
        </table:table-row>
        <table:table-row table:style-name="Tabla7.2">
          <table:table-cell table:style-name="Tabla7.A7" office:value-type="string">
            <text:p text:style-name="P13" loext:marker-style-name="T36"><text:span text:style-name="T36">5</text:span><text:span text:style-name="T36"/></text:p>
          </table:table-cell>
          <table:table-cell table:style-name="Tabla7.A7" table:number-columns-spanned="2" office:value-type="string">
            <text:p text:style-name="P13" loext:marker-style-name="T36"><text:span text:style-name="T36">17722</text:span><text:span text:style-name="T36"/></text:p>
          </table:table-cell>
          <table:covered-table-cell/>
          <table:table-cell table:style-name="Tabla7.A7" table:number-columns-spanned="2" office:value-type="string">
            <text:p text:style-name="P13" loext:marker-style-name="T36"><text:span text:style-name="T36">7</text:span><text:span text:style-name="T36"/></text:p>
          </table:table-cell>
          <table:covered-table-cell/>
          <table:table-cell table:style-name="Tabla7.A7" office:value-type="string">
            <text:p text:style-name="P13" loext:marker-style-name="T36"><text:span text:style-name="T36">115437</text:span><text:span text:style-name="T36"/></text:p>
          </table:table-cell>
        </table:table-row>
      </table:table>
      <text:p text:style-name="Notas_20_APA"><text:span text:style-name="T50">Nota.</text:span> Equipo de trabajo</text:p>
      <text:list text:continue-numbering="true" text:style-name="WWNum17">
        <text:list-item>
          <text:list>
            <text:list-item>
              <text:h text:style-name="P74" text:outline-level="2"><text:bookmark text:name="_heading=h.qsh70q"/><text:bookmark-start text:name="_Toc106699132"/>Análisis de la oferta<text:bookmark-end text:name="_Toc106699132"/></text:h>
              <text:list>
                <text:list-item>
                  <text:h text:style-name="P84" text:outline-level="3"><text:bookmark text:name="_heading=h.3as4poj"/><text:bookmark-start text:name="_Toc106699133"/>Descripción del mercado de la oferta.<text:bookmark-end text:name="_Toc106699133"/> </text:h>
                </text:list-item>
              </text:list>
            </text:list-item>
          </text:list>
        </text:list-item>
      </text:list>
      <text:p text:style-name="P116">El mercado de los polos en la región Ayacucho no es una competencia directa para nuestro negocio ya que no está sumido en la similitud absoluta con los servicios que brindara nuestro negocio como el estampado de polos personalizados, sin embargo, existen tiendas virtuales de otras regiones como Lima, quienes hacen los polos personalizados y hacen los envíos a la ciudad de Ayacucho, siendo estas tiendas no tan significativas en el mercado. </text:p>
      <text:list text:continue-numbering="true" text:style-name="WWNum17">
        <text:list-item>
          <text:list>
            <text:list-item>
              <text:h text:style-name="P74" text:outline-level="2"><text:bookmark text:name="_heading=h.1pxezwc"/><text:bookmark-start text:name="_Toc106699134"/>Balance Oferta-Demanda.<text:bookmark-end text:name="_Toc106699134"/></text:h>
            </text:list-item>
          </text:list>
        </text:list-item>
      </text:list>
      <text:p text:style-name="P116">En base a la información obtenida por el equipo, por dos conocidos del grupo que se dedican a la venta de polos para damas y caballeros, mencionaron que venden un promedio de 27 polos por semana, este dato fue proyectado con una tasa de crecimiento de 1.30% obtenida de INEI.</text:p>
      <text:p text:style-name="P116"/>
      <text:p text:style-name="TÍTULO_20_Tablas_20_y_20_Figuras" loext:marker-style-name="T51"><text:bookmark-start text:name="_Toc106698905"/><text:span text:style-name="T51">Tabla </text:span><text:bookmark-end text:name="_Toc106698905"/><text:span text:style-name="T51"><text:sequence text:ref-name="refTable6" text:name="Table" text:formula="ooow:Table+1" style:num-format="1">7</text:sequence></text:span><text:span text:style-name="T51"><text:s/></text:span></text:p>
      <text:p text:style-name="TÍTULO_20_Tablas_20_y_20_Figuras">Demanda Insatisfecha</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office:value-type="string">
            <text:p text:style-name="P15" loext:marker-style-name="T36"><text:span text:style-name="T36">Año</text:span><text:span text:style-name="T36"/></text:p>
          </table:table-cell>
          <table:table-cell table:style-name="Tabla8.A1" office:value-type="string">
            <text:p text:style-name="P15" loext:marker-style-name="T36"><text:span text:style-name="T36">Número de personas con intención de compras</text:span><text:span text:style-name="T36"/></text:p>
          </table:table-cell>
          <table:table-cell table:style-name="Tabla8.A1" office:value-type="string">
            <text:p text:style-name="P15" loext:marker-style-name="T36"><text:span text:style-name="T36">Consumo per cápita</text:span><text:span text:style-name="T36"/></text:p>
          </table:table-cell>
          <table:table-cell table:style-name="Tabla8.A1" office:value-type="string">
            <text:p text:style-name="P15" loext:marker-style-name="T36"><text:span text:style-name="T36">Demanda objetivo</text:span><text:span text:style-name="T36"/></text:p>
          </table:table-cell>
          <table:table-cell table:style-name="Tabla8.A1" office:value-type="string">
            <text:p text:style-name="P15" loext:marker-style-name="T36"><text:span text:style-name="T36">Oferta</text:span><text:span text:style-name="T36"/></text:p>
          </table:table-cell>
          <table:table-cell table:style-name="Tabla8.A1" office:value-type="string">
            <text:p text:style-name="P15" loext:marker-style-name="T36"><text:span text:style-name="T36">Demanda insatisfecha Oferta-Demanda</text:span><text:span text:style-name="T36"/></text:p>
          </table:table-cell>
        </table:table-row>
        <table:table-row table:style-name="Tabla8.2">
          <table:table-cell table:style-name="Tabla8.A2" office:value-type="string">
            <text:p text:style-name="P22" loext:marker-style-name="T36"><text:span text:style-name="T36">0</text:span><text:span text:style-name="T36"/></text:p>
          </table:table-cell>
          <table:table-cell table:style-name="Tabla8.A2" office:value-type="string">
            <text:p text:style-name="P15" loext:marker-style-name="T36"><text:span text:style-name="T36">16614</text:span><text:span text:style-name="T36"/></text:p>
          </table:table-cell>
          <table:table-cell table:style-name="Tabla8.A2" office:value-type="string">
            <text:p text:style-name="P15" loext:marker-style-name="T36"><text:span text:style-name="T36">7</text:span><text:span text:style-name="T36"/></text:p>
          </table:table-cell>
          <table:table-cell table:style-name="Tabla8.A2" office:value-type="string">
            <text:p text:style-name="P15" loext:marker-style-name="T36"><text:span text:style-name="T36">108218</text:span><text:span text:style-name="T36"/></text:p>
          </table:table-cell>
          <table:table-cell table:style-name="Tabla8.A2" office:value-type="string">
            <text:p text:style-name="P15" loext:marker-style-name="T36"><text:span text:style-name="T36">1296</text:span><text:span text:style-name="T36"/></text:p>
          </table:table-cell>
          <table:table-cell table:style-name="Tabla8.A2" office:value-type="string">
            <text:p text:style-name="P15" loext:marker-style-name="T36"><text:span text:style-name="T36">106922</text:span><text:span text:style-name="T36"/></text:p>
          </table:table-cell>
        </table:table-row>
        <table:table-row table:style-name="Tabla8.2">
          <table:table-cell table:style-name="Tabla8.A3" office:value-type="string">
            <text:p text:style-name="P22" loext:marker-style-name="T36"><text:span text:style-name="T36">1</text:span><text:span text:style-name="T36"/></text:p>
          </table:table-cell>
          <table:table-cell table:style-name="Tabla8.A3" office:value-type="string">
            <text:p text:style-name="P15" loext:marker-style-name="T36"><text:span text:style-name="T36">16830</text:span><text:span text:style-name="T36"/></text:p>
          </table:table-cell>
          <table:table-cell table:style-name="Tabla8.A3" office:value-type="string">
            <text:p text:style-name="P15" loext:marker-style-name="T36"><text:span text:style-name="T36">7</text:span><text:span text:style-name="T36"/></text:p>
          </table:table-cell>
          <table:table-cell table:style-name="Tabla8.A3" office:value-type="string">
            <text:p text:style-name="P15" loext:marker-style-name="T36"><text:span text:style-name="T36">109625</text:span><text:span text:style-name="T36"/></text:p>
          </table:table-cell>
          <table:table-cell table:style-name="Tabla8.A3" office:value-type="string">
            <text:p text:style-name="P15" loext:marker-style-name="T36"><text:span text:style-name="T36">1313</text:span><text:span text:style-name="T36"/></text:p>
          </table:table-cell>
          <table:table-cell table:style-name="Tabla8.A3" office:value-type="string">
            <text:p text:style-name="P15" loext:marker-style-name="T36"><text:span text:style-name="T36">108312</text:span><text:span text:style-name="T36"/></text:p>
          </table:table-cell>
        </table:table-row>
        <table:table-row table:style-name="Tabla8.2">
          <table:table-cell table:style-name="Tabla8.A3" office:value-type="string">
            <text:p text:style-name="P22" loext:marker-style-name="T36"><text:span text:style-name="T36">2</text:span><text:span text:style-name="T36"/></text:p>
          </table:table-cell>
          <table:table-cell table:style-name="Tabla8.A3" office:value-type="string">
            <text:p text:style-name="P15" loext:marker-style-name="T36"><text:span text:style-name="T36">17049</text:span><text:span text:style-name="T36"/></text:p>
          </table:table-cell>
          <table:table-cell table:style-name="Tabla8.A3" office:value-type="string">
            <text:p text:style-name="P15" loext:marker-style-name="T36"><text:span text:style-name="T36">7</text:span><text:span text:style-name="T36"/></text:p>
          </table:table-cell>
          <table:table-cell table:style-name="Tabla8.A3" office:value-type="string">
            <text:p text:style-name="P15" loext:marker-style-name="T36"><text:span text:style-name="T36">111050</text:span><text:span text:style-name="T36"/></text:p>
          </table:table-cell>
          <table:table-cell table:style-name="Tabla8.A3" office:value-type="string">
            <text:p text:style-name="P15" loext:marker-style-name="T36"><text:span text:style-name="T36">1330</text:span><text:span text:style-name="T36"/></text:p>
          </table:table-cell>
          <table:table-cell table:style-name="Tabla8.A3" office:value-type="string">
            <text:p text:style-name="P15" loext:marker-style-name="T36"><text:span text:style-name="T36">109720</text:span><text:span text:style-name="T36"/></text:p>
          </table:table-cell>
        </table:table-row>
        <table:table-row table:style-name="Tabla8.2">
          <table:table-cell table:style-name="Tabla8.A3" office:value-type="string">
            <text:p text:style-name="P22" loext:marker-style-name="T36"><text:span text:style-name="T36">3</text:span><text:span text:style-name="T36"/></text:p>
          </table:table-cell>
          <table:table-cell table:style-name="Tabla8.A3" office:value-type="string">
            <text:p text:style-name="P15" loext:marker-style-name="T36"><text:span text:style-name="T36">17270</text:span><text:span text:style-name="T36"/></text:p>
          </table:table-cell>
          <table:table-cell table:style-name="Tabla8.A3" office:value-type="string">
            <text:p text:style-name="P15" loext:marker-style-name="T36"><text:span text:style-name="T36">7</text:span><text:span text:style-name="T36"/></text:p>
          </table:table-cell>
          <table:table-cell table:style-name="Tabla8.A3" office:value-type="string">
            <text:p text:style-name="P15" loext:marker-style-name="T36"><text:span text:style-name="T36">112493</text:span><text:span text:style-name="T36"/></text:p>
          </table:table-cell>
          <table:table-cell table:style-name="Tabla8.A3" office:value-type="string">
            <text:p text:style-name="P15" loext:marker-style-name="T36"><text:span text:style-name="T36">1347</text:span><text:span text:style-name="T36"/></text:p>
          </table:table-cell>
          <table:table-cell table:style-name="Tabla8.A3" office:value-type="string">
            <text:p text:style-name="P15" loext:marker-style-name="T36"><text:span text:style-name="T36">111146</text:span><text:span text:style-name="T36"/></text:p>
          </table:table-cell>
        </table:table-row>
        <table:table-row table:style-name="Tabla8.2">
          <table:table-cell table:style-name="Tabla8.A3" office:value-type="string">
            <text:p text:style-name="P22" loext:marker-style-name="T36"><text:span text:style-name="T36">4</text:span><text:span text:style-name="T36"/></text:p>
          </table:table-cell>
          <table:table-cell table:style-name="Tabla8.A3" office:value-type="string">
            <text:p text:style-name="P15" loext:marker-style-name="T36"><text:span text:style-name="T36">17495</text:span><text:span text:style-name="T36"/></text:p>
          </table:table-cell>
          <table:table-cell table:style-name="Tabla8.A3" office:value-type="string">
            <text:p text:style-name="P15" loext:marker-style-name="T36"><text:span text:style-name="T36">7</text:span><text:span text:style-name="T36"/></text:p>
          </table:table-cell>
          <table:table-cell table:style-name="Tabla8.A3" office:value-type="string">
            <text:p text:style-name="P15" loext:marker-style-name="T36"><text:span text:style-name="T36">113956</text:span><text:span text:style-name="T36"/></text:p>
          </table:table-cell>
          <table:table-cell table:style-name="Tabla8.A3" office:value-type="string">
            <text:p text:style-name="P15" loext:marker-style-name="T36"><text:span text:style-name="T36">1365</text:span><text:span text:style-name="T36"/></text:p>
          </table:table-cell>
          <table:table-cell table:style-name="Tabla8.A3" office:value-type="string">
            <text:p text:style-name="P15" loext:marker-style-name="T36"><text:span text:style-name="T36">112591</text:span><text:span text:style-name="T36"/></text:p>
          </table:table-cell>
        </table:table-row>
        <table:table-row table:style-name="Tabla8.2">
          <table:table-cell table:style-name="Tabla8.A7" office:value-type="string">
            <text:p text:style-name="P22" loext:marker-style-name="T36"><text:span text:style-name="T36">5</text:span><text:span text:style-name="T36"/></text:p>
          </table:table-cell>
          <table:table-cell table:style-name="Tabla8.A7" office:value-type="string">
            <text:p text:style-name="P15" loext:marker-style-name="T36"><text:span text:style-name="T36">17722</text:span><text:span text:style-name="T36"/></text:p>
          </table:table-cell>
          <table:table-cell table:style-name="Tabla8.A7" office:value-type="string">
            <text:p text:style-name="P15" loext:marker-style-name="T36"><text:span text:style-name="T36">7</text:span><text:span text:style-name="T36"/></text:p>
          </table:table-cell>
          <table:table-cell table:style-name="Tabla8.A7" office:value-type="string">
            <text:p text:style-name="P15" loext:marker-style-name="T36"><text:span text:style-name="T36">115437</text:span><text:span text:style-name="T36"/></text:p>
          </table:table-cell>
          <table:table-cell table:style-name="Tabla8.A7" office:value-type="string">
            <text:p text:style-name="P15" loext:marker-style-name="T36"><text:span text:style-name="T36">1382</text:span><text:span text:style-name="T36"/></text:p>
          </table:table-cell>
          <table:table-cell table:style-name="Tabla8.A7" office:value-type="string">
            <text:p text:style-name="P15" loext:marker-style-name="T36"><text:span text:style-name="T36">114055</text:span><text:span text:style-name="T36"/></text:p>
          </table:table-cell>
        </table:table-row>
      </table:table>
      <text:p text:style-name="Notas_20_APA"><text:span text:style-name="T50">Nota.</text:span> Equipo de trabajo</text:p>
      <text:list text:continue-numbering="true" text:style-name="WWNum17">
        <text:list-item>
          <text:list>
            <text:list-item>
              <text:h text:style-name="P74" text:outline-level="2"><text:bookmark text:name="_heading=h.49x2ik5"/><text:bookmark-start text:name="_Toc106699135"/>Pronóstico de la demanda.<text:bookmark-end text:name="_Toc106699135"/></text:h>
            </text:list-item>
          </text:list>
        </text:list-item>
      </text:list>
      <text:p text:style-name="P116"><text:soft-page-break/></text:p>
      <text:p text:style-name="TÍTULO_20_Tablas_20_y_20_Figuras" loext:marker-style-name="T51"><text:bookmark-start text:name="_Toc106698906"/><text:span text:style-name="T51">Tabla </text:span><text:bookmark-end text:name="_Toc106698906"/><text:span text:style-name="T51"><text:sequence text:ref-name="refTable7" text:name="Table" text:formula="ooow:Table+1" style:num-format="1">8</text:sequence></text:span><text:span text:style-name="T51"><text:s/></text:span></text:p>
      <text:p text:style-name="TÍTULO_20_Tablas_20_y_20_Figuras">Demanda potencial del mercado proyectado para el horizonte de evaluación</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3" loext:marker-style-name="T36"><text:span text:style-name="T36">Año</text:span><text:span text:style-name="T36"/></text:p>
          </table:table-cell>
          <table:table-cell table:style-name="Tabla9.A1" office:value-type="string">
            <text:p text:style-name="P15" loext:marker-style-name="T36"><text:span text:style-name="T36">Número de personas potenciales</text:span><text:span text:style-name="T36"/></text:p>
          </table:table-cell>
          <table:table-cell table:style-name="Tabla9.A1" office:value-type="string">
            <text:p text:style-name="P15" loext:marker-style-name="T36"><text:span text:style-name="T36">Consumo per cápita al año</text:span><text:span text:style-name="T36"/></text:p>
          </table:table-cell>
          <table:table-cell table:style-name="Tabla9.A1" office:value-type="string">
            <text:p text:style-name="P15" loext:marker-style-name="T36"><text:span text:style-name="T36">Demanda Potencial</text:span><text:span text:style-name="T36"/></text:p>
          </table:table-cell>
        </table:table-row>
        <table:table-row table:style-name="Tabla9.2">
          <table:table-cell table:style-name="Tabla9.A2" office:value-type="string">
            <text:p text:style-name="P13" loext:marker-style-name="T36"><text:span text:style-name="T36">0</text:span><text:span text:style-name="T36"/></text:p>
          </table:table-cell>
          <table:table-cell table:style-name="Tabla9.A2" office:value-type="string">
            <text:p text:style-name="P13" loext:marker-style-name="T36"><text:span text:style-name="T36">42600</text:span><text:span text:style-name="T36"/></text:p>
          </table:table-cell>
          <table:table-cell table:style-name="Tabla9.A2" office:value-type="string">
            <text:p text:style-name="P13" loext:marker-style-name="T36"><text:span text:style-name="T36">7</text:span><text:span text:style-name="T36"/></text:p>
          </table:table-cell>
          <table:table-cell table:style-name="Tabla9.A2" office:value-type="string">
            <text:p text:style-name="P13" loext:marker-style-name="T36"><text:span text:style-name="T36">277481</text:span><text:span text:style-name="T36"/></text:p>
          </table:table-cell>
        </table:table-row>
        <table:table-row table:style-name="Tabla9.2">
          <table:table-cell table:style-name="Tabla9.A2" office:value-type="string">
            <text:p text:style-name="P13" loext:marker-style-name="T36"><text:span text:style-name="T36">1</text:span><text:span text:style-name="T36"/></text:p>
          </table:table-cell>
          <table:table-cell table:style-name="Tabla9.A2" office:value-type="string">
            <text:p text:style-name="P13" loext:marker-style-name="T36"><text:span text:style-name="T36">43154</text:span><text:span text:style-name="T36"/></text:p>
          </table:table-cell>
          <table:table-cell table:style-name="Tabla9.A2" office:value-type="string">
            <text:p text:style-name="P13" loext:marker-style-name="T36"><text:span text:style-name="T36">7</text:span><text:span text:style-name="T36"/></text:p>
          </table:table-cell>
          <table:table-cell table:style-name="Tabla9.A2" office:value-type="string">
            <text:p text:style-name="P13" loext:marker-style-name="T36"><text:span text:style-name="T36">281089</text:span><text:span text:style-name="T36"/></text:p>
          </table:table-cell>
        </table:table-row>
        <table:table-row table:style-name="Tabla9.2">
          <table:table-cell table:style-name="Tabla9.A2" office:value-type="string">
            <text:p text:style-name="P13" loext:marker-style-name="T36"><text:span text:style-name="T36">2</text:span><text:span text:style-name="T36"/></text:p>
          </table:table-cell>
          <table:table-cell table:style-name="Tabla9.A2" office:value-type="string">
            <text:p text:style-name="P13" loext:marker-style-name="T36"><text:span text:style-name="T36">43715</text:span><text:span text:style-name="T36"/></text:p>
          </table:table-cell>
          <table:table-cell table:style-name="Tabla9.A2" office:value-type="string">
            <text:p text:style-name="P13" loext:marker-style-name="T36"><text:span text:style-name="T36">7</text:span><text:span text:style-name="T36"/></text:p>
          </table:table-cell>
          <table:table-cell table:style-name="Tabla9.A2" office:value-type="string">
            <text:p text:style-name="P13" loext:marker-style-name="T36"><text:span text:style-name="T36">284743</text:span><text:span text:style-name="T36"/></text:p>
          </table:table-cell>
        </table:table-row>
        <table:table-row table:style-name="Tabla9.2">
          <table:table-cell table:style-name="Tabla9.A2" office:value-type="string">
            <text:p text:style-name="P13" loext:marker-style-name="T36"><text:span text:style-name="T36">3</text:span><text:span text:style-name="T36"/></text:p>
          </table:table-cell>
          <table:table-cell table:style-name="Tabla9.A2" office:value-type="string">
            <text:p text:style-name="P13" loext:marker-style-name="T36"><text:span text:style-name="T36">44283</text:span><text:span text:style-name="T36"/></text:p>
          </table:table-cell>
          <table:table-cell table:style-name="Tabla9.A2" office:value-type="string">
            <text:p text:style-name="P13" loext:marker-style-name="T36"><text:span text:style-name="T36">7</text:span><text:span text:style-name="T36"/></text:p>
          </table:table-cell>
          <table:table-cell table:style-name="Tabla9.A2" office:value-type="string">
            <text:p text:style-name="P13" loext:marker-style-name="T36"><text:span text:style-name="T36">288444</text:span><text:span text:style-name="T36"/></text:p>
          </table:table-cell>
        </table:table-row>
        <table:table-row table:style-name="Tabla9.2">
          <table:table-cell table:style-name="Tabla9.A2" office:value-type="string">
            <text:p text:style-name="P13" loext:marker-style-name="T36"><text:span text:style-name="T36">4</text:span><text:span text:style-name="T36"/></text:p>
          </table:table-cell>
          <table:table-cell table:style-name="Tabla9.A2" office:value-type="string">
            <text:p text:style-name="P13" loext:marker-style-name="T36"><text:span text:style-name="T36">44859</text:span><text:span text:style-name="T36"/></text:p>
          </table:table-cell>
          <table:table-cell table:style-name="Tabla9.A2" office:value-type="string">
            <text:p text:style-name="P13" loext:marker-style-name="T36"><text:span text:style-name="T36">7</text:span><text:span text:style-name="T36"/></text:p>
          </table:table-cell>
          <table:table-cell table:style-name="Tabla9.A2" office:value-type="string">
            <text:p text:style-name="P13" loext:marker-style-name="T36"><text:span text:style-name="T36">292194</text:span><text:span text:style-name="T36"/></text:p>
          </table:table-cell>
        </table:table-row>
        <table:table-row table:style-name="Tabla9.2">
          <table:table-cell table:style-name="Tabla9.A7" office:value-type="string">
            <text:p text:style-name="P13" loext:marker-style-name="T36"><text:span text:style-name="T36">5</text:span><text:span text:style-name="T36"/></text:p>
          </table:table-cell>
          <table:table-cell table:style-name="Tabla9.A7" office:value-type="string">
            <text:p text:style-name="P13" loext:marker-style-name="T36"><text:span text:style-name="T36">45442</text:span><text:span text:style-name="T36"/></text:p>
          </table:table-cell>
          <table:table-cell table:style-name="Tabla9.A7" office:value-type="string">
            <text:p text:style-name="P13" loext:marker-style-name="T36"><text:span text:style-name="T36">7</text:span><text:span text:style-name="T36"/></text:p>
          </table:table-cell>
          <table:table-cell table:style-name="Tabla9.A7" office:value-type="string">
            <text:p text:style-name="P13" loext:marker-style-name="T36"><text:span text:style-name="T36">295993</text:span><text:span text:style-name="T36"/></text:p>
          </table:table-cell>
        </table:table-row>
      </table:table>
      <text:p text:style-name="Notas_20_APA"><text:bookmark text:name="_heading=h.2p2csry"/><text:span text:style-name="T50">Nota</text:span>. equipo de trabajo</text:p>
      <text:list text:continue-numbering="true" text:style-name="WWNum17">
        <text:list-item>
          <text:list>
            <text:list-item>
              <text:h text:style-name="P74" text:outline-level="2"><text:bookmark text:name="_heading=h.147n2zr"/><text:bookmark-start text:name="_Toc106699136"/>Estrategias de Marketing.<draw:frame draw:style-name="fr6" draw:name="image30.png" text:anchor-type="char" svg:x="10.864cm" svg:y="0.399cm" svg:width="4.36cm" svg:height="3.336cm" draw:z-index="4"><draw:image xlink:href="Pictures/10000001000001EC000001E85763B480.png" xlink:type="simple" xlink:show="embed" xlink:actuate="onLoad" draw:mime-type="image/png"/><svg:desc>Interfaz de usuario gráfica, Aplicación

Descripción generada automáticamente</svg:desc></draw:frame><text:bookmark-end text:name="_Toc106699136"/></text:h>
            </text:list-item>
          </text:list>
        </text:list-item>
      </text:list>
      <text:p text:style-name="P116">Este es el logotipo que representa a nuestro negocio, es la fusión de STAMP palabra en ingles que significa estampado con ADEK que son las iniciales de los nombres de los integrantes del grupo de trabajo.</text:p>
      <text:list text:continue-numbering="true" text:style-name="WWNum17">
        <text:list-item>
          <text:list>
            <text:list-item>
              <text:list>
                <text:list-item>
                  <text:h text:style-name="P84" text:outline-level="3"><text:bookmark text:name="_heading=h.3o7alnk"/><text:bookmark-start text:name="_Toc106699137"/>Producto<text:bookmark-end text:name="_Toc106699137"/></text:h>
                </text:list-item>
              </text:list>
            </text:list-item>
          </text:list>
        </text:list-item>
      </text:list>
      <text:p text:style-name="P116" loext:marker-style-name="T47">En base al video e imágenes referenciales presentadas en el formulario; de los 276 encuestados de los distritos metropolitanos de Ayacucho del cual el 37% de un total de 189 personas estarían dispuestos en adquirir nuestros productos.<text:span text:style-name="T47"> </text:span><text:span text:style-name="T47"/></text:p>
      <text:list text:continue-numbering="true" text:style-name="WWNum17">
        <text:list-item>
          <text:list>
            <text:list-item>
              <text:list>
                <text:list-item>
                  <text:h text:style-name="P84" text:outline-level="3"><text:bookmark text:name="_heading=h.23ckvvd"/><text:bookmark-start text:name="_Toc106699138"/>Precio<text:bookmark-end text:name="_Toc106699138"/></text:h>
                </text:list-item>
              </text:list>
            </text:list-item>
          </text:list>
        </text:list-item>
      </text:list>
      <text:p text:style-name="P116"><text:bookmark text:name="_heading=h.ihv636"/>En la pregunta 8 de la encuesta, después de los filtros mencionados, un total de 179 personas están dispuestos a pagar S/30.00 (Treinta con 00/100 soles) es decir el 25.93%. Además, estimamos vender los polos personalizados a un precio promedio de 34 soles.</text:p>
      <text:list text:continue-numbering="true" text:style-name="WWNum17">
        <text:list-item>
          <text:list>
            <text:list-item>
              <text:list>
                <text:list-item>
                  <text:h text:style-name="P84" text:outline-level="3"><text:bookmark text:name="_heading=h.32hioqz"/><text:bookmark-start text:name="_Toc106699139"/>Plaza o distribución<text:bookmark-end text:name="_Toc106699139"/></text:h>
                </text:list-item>
              </text:list>
            </text:list-item>
          </text:list>
        </text:list-item>
      </text:list>
      <text:p text:style-name="P116"><text:span text:style-name="T56"><text:s/></text:span>Según la opinión recogida de las 189 personas que están en el distrito metropolitano de Ayacucho, el 64% de ellos estarían dispuestos en adquirir nuestros productos de forma virtual y presencial.</text:p>
      <text:list text:continue-numbering="true" text:style-name="WWNum17">
        <text:list-item>
          <text:list>
            <text:list-item>
              <text:list>
                <text:list-item>
                  <text:h text:style-name="P84" text:outline-level="3"><text:bookmark text:name="_heading=h.1hmsyys"/><text:bookmark-start text:name="_Toc106699140"/>Promoción y publicidad<text:bookmark-end text:name="_Toc106699140"/></text:h>
                </text:list-item>
              </text:list>
            </text:list-item>
          </text:list>
        </text:list-item>
      </text:list>
      <text:p text:style-name="P116"><text:span text:style-name="T56"><text:s/></text:span>Según la opinión recogida de los 276 encuestados, el 90% estarían prefiere recibir la publicidad y diversas promociones vía redes sociales.</text:p>
      <text:p text:style-name="P116">La segunda estrategia de marketing tiene como objetivo conseguir la confianza del cliente para ello garantizamos ofrecer una buena calidad del producto, contamos con polos a base de 100% de algodón “20 al 1”.</text:p>
      <text:list text:continue-numbering="true" text:style-name="WWNum17">
        <text:list-item>
          <text:list>
            <text:list-item>
              <text:h text:style-name="P75" text:outline-level="2"><text:bookmark text:name="_heading=h.41mghml"/><text:s/><text:bookmark-start text:name="_Toc106699141"/>Presupuesto Promocional<text:bookmark-end text:name="_Toc106699141"/> </text:h>
            </text:list-item>
          </text:list>
        </text:list-item>
      </text:list>
      <text:p text:style-name="TÍTULO_20_Tablas_20_y_20_Figuras" loext:marker-style-name="T51"><text:bookmark-start text:name="_Toc106698907"/><text:span text:style-name="T51">Tabla </text:span><text:bookmark-end text:name="_Toc106698907"/><text:span text:style-name="T51"><text:sequence text:ref-name="refTable8" text:name="Table" text:formula="ooow:Table+1" style:num-format="1">9</text:sequence></text:span><text:span text:style-name="T51"><text:s/></text:span></text:p>
      <text:p text:style-name="TÍTULO_20_Tablas_20_y_20_Figuras">Presupuesto promocional</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3">Actividad</text:p>
          </table:table-cell>
          <table:table-cell table:style-name="Tabla16.A1" office:value-type="string">
            <text:p text:style-name="P13">Mensual</text:p>
          </table:table-cell>
          <table:table-cell table:style-name="Tabla16.A1" office:value-type="string">
            <text:p text:style-name="P13">Anual</text:p>
          </table:table-cell>
        </table:table-row>
        <table:table-row table:style-name="Tabla16.1">
          <table:table-cell table:style-name="Tabla16.A2" office:value-type="string">
            <text:p text:style-name="P13">Publicidad</text:p>
            <text:p text:style-name="P13">Redes sociales</text:p>
          </table:table-cell>
          <table:table-cell table:style-name="Tabla16.A2" office:value-type="string">
            <text:p text:style-name="P13"/>
            <text:p text:style-name="P13">S/. 24</text:p>
          </table:table-cell>
          <table:table-cell table:style-name="Tabla16.A2" office:value-type="string">
            <text:p text:style-name="P13"/>
            <text:p text:style-name="P13">S/. 144</text:p>
          </table:table-cell>
        </table:table-row>
        <table:table-row table:style-name="Tabla16.1">
          <table:table-cell table:style-name="Tabla16.A2" office:value-type="string">
            <text:p text:style-name="P13">Ofertas especiales</text:p>
            <text:p text:style-name="P13">Descuentos</text:p>
          </table:table-cell>
          <table:table-cell table:style-name="Tabla16.A2" office:value-type="string">
            <text:p text:style-name="P13"/>
            <text:p text:style-name="P13">S/. 52.5</text:p>
          </table:table-cell>
          <table:table-cell table:style-name="Tabla16.A2" office:value-type="string">
            <text:p text:style-name="P13"/>
            <text:p text:style-name="P13">S/. 315</text:p>
          </table:table-cell>
        </table:table-row>
        <table:table-row table:style-name="Tabla16.1">
          <table:table-cell table:style-name="Tabla16.A4" office:value-type="string">
            <text:p text:style-name="P13">Total</text:p>
          </table:table-cell>
          <table:table-cell table:style-name="Tabla16.A4" office:value-type="string">
            <text:p text:style-name="P13" loext:marker-style-name="T57">S/. 76.5<text:span text:style-name="T57"/></text:p>
          </table:table-cell>
          <table:table-cell table:style-name="Tabla16.A4" office:value-type="string">
            <text:p text:style-name="P13">S/. 459</text:p>
          </table:table-cell>
        </table:table-row>
      </table:table>
      <text:p text:style-name="Notas_20_APA"><text:span text:style-name="T50">Nota.</text:span> Elaboración propia<text:bookmark-start text:name="_heading=h.2grqrue"/></text:p>
      <text:list xml:id="list32343597364317" text:continue-numbering="true" text:style-name="WWNum17">
        <text:list-item>
          <text:list>
            <text:list-item>
              <text:h text:style-name="P76" text:outline-level="2"><text:bookmark-end text:name="_heading=h.2grqrue"/><text:bookmark-start text:name="_Toc106699142"/>Modelo de negocio CANVA<text:bookmark-end text:name="_Toc106699142"/>S<draw:frame draw:style-name="fr5" draw:name="image39.png" text:anchor-type="char" svg:x="-1.976cm" svg:y="1.134cm" svg:width="28.208cm" svg:height="13.839cm" draw:z-index="5"><draw:image xlink:href="Pictures/100000010000054B0000037B1AB69FB0.png" xlink:type="simple" xlink:show="embed" xlink:actuate="onLoad" draw:mime-type="image/png"/><svg:desc>Texto, Escala de tiempo

Descripción generada automáticamente</svg:desc></draw:frame></text:h>
            </text:list-item>
          </text:list>
        </text:list-item>
        <text:list-item>
          <text:h text:style-name="P71" text:outline-level="1"><text:bookmark text:name="_heading=h.vx1227"/><text:bookmark-start text:name="_Toc106699143"/>Capitulo III.- <text:tab/>Estudio Técnico<text:bookmark-end text:name="_Toc106699143"/></text:h>
          <text:list>
            <text:list-item>
              <text:h text:style-name="P74" text:outline-level="2"><text:bookmark text:name="_heading=h.3fwokq0"/><text:bookmark-start text:name="_Toc106699144"/>Tamaño y localización del proyecto<text:bookmark-end text:name="_Toc106699144"/> </text:h>
              <text:list>
                <text:list-item>
                  <text:h text:style-name="P84" text:outline-level="3"><text:bookmark text:name="_heading=h.1v1yuxt"/><text:bookmark-start text:name="_Toc106699145"/>Tamaño<text:bookmark-end text:name="_Toc106699145"/></text:h>
                </text:list-item>
              </text:list>
            </text:list-item>
          </text:list>
        </text:list-item>
      </text:list>
      <text:p text:style-name="P116" loext:marker-style-name="T35"><text:span text:style-name="T35">Para la capacidad de producción nuestra empresa tomará en cuenta los siguientes factores determinantes:</text:span><text:span text:style-name="T35"/></text:p>
      <text:list text:continue-list="list32343519100279" text:style-name="WWNum6">
        <text:list-item>
          <text:p text:style-name="P92" loext:marker-style-name="T35"><text:span text:style-name="T35">Tecnología (plancha plana)</text:span><text:span text:style-name="T35"/></text:p>
        </text:list-item>
      </text:list>
      <text:list text:style-name="WWNum7">
        <text:list-item>
          <text:p text:style-name="P93" loext:marker-style-name="T35"><text:span text:style-name="T35">Insumos (cantidad de papel transfer y tinta pigmentada)</text:span><text:span text:style-name="T35"/></text:p>
        </text:list-item>
        <text:list-item>
          <text:p text:style-name="P93" loext:marker-style-name="T35"><text:span text:style-name="T35">Tiempo de creación, modificación e impresión de imágenes.</text:span><text:span text:style-name="T35"/></text:p>
        </text:list-item>
        <text:list-item>
          <text:p text:style-name="P93" loext:marker-style-name="T35"><text:span text:style-name="T35">Tiempo de estampado del polo </text:span><text:span text:style-name="T35"/></text:p>
        </text:list-item>
        <text:list-item>
          <text:p text:style-name="P93" loext:marker-style-name="T35"><text:span text:style-name="T35">Demanda insatisfecha proyectada (114055) </text:span><text:span text:style-name="T35"/></text:p>
        </text:list-item>
      </text:list>
      <text:p text:style-name="P116"/>
      <text:p text:style-name="TÍTULO_20_Tablas_20_y_20_Figuras" loext:marker-style-name="T51"><text:bookmark-start text:name="_Toc106698908"/><text:span text:style-name="T51">Tabla </text:span><text:bookmark-end text:name="_Toc106698908"/><text:span text:style-name="T51"><text:sequence text:ref-name="refTable9" text:name="Table" text:formula="ooow:Table+1" style:num-format="1">10</text:sequence></text:span><text:span text:style-name="T51"><text:s/></text:span></text:p>
      <text:p text:style-name="TÍTULO_20_Tablas_20_y_20_Figuras">Capacidad Instalada Total</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office:value-type="string">
            <text:p text:style-name="P15" loext:marker-style-name="T36"><text:span text:style-name="T36">Capacidad máxima diaria</text:span><text:span text:style-name="T36"/></text:p>
          </table:table-cell>
          <table:table-cell table:style-name="Tabla23.A1" office:value-type="string">
            <text:p text:style-name="P15" loext:marker-style-name="T36"><text:span text:style-name="T36">Capacidad normal diaria</text:span><text:span text:style-name="T36"/></text:p>
          </table:table-cell>
          <table:table-cell table:style-name="Tabla23.A1" office:value-type="string">
            <text:p text:style-name="P15" loext:marker-style-name="T36"><text:span text:style-name="T36">Turnos diarios (8 h)</text:span><text:span text:style-name="T36"/></text:p>
          </table:table-cell>
          <table:table-cell table:style-name="Tabla23.A1" office:value-type="string">
            <text:p text:style-name="P15" loext:marker-style-name="T36"><text:span text:style-name="T36">Total, día</text:span><text:span text:style-name="T36"/></text:p>
          </table:table-cell>
          <table:table-cell table:style-name="Tabla23.A1" office:value-type="string">
            <text:p text:style-name="P15" loext:marker-style-name="T36"><text:span text:style-name="T36">Total, mes</text:span><text:span text:style-name="T36"/></text:p>
            <text:p text:style-name="P15" loext:marker-style-name="T36"><text:span text:style-name="T36">(26 d)</text:span><text:span text:style-name="T36"/></text:p>
          </table:table-cell>
          <table:table-cell table:style-name="Tabla23.A1" office:value-type="string">
            <text:p text:style-name="P15" loext:marker-style-name="T36"><text:span text:style-name="T36">Total, año</text:span><text:span text:style-name="T36"/></text:p>
          </table:table-cell>
        </table:table-row>
        <table:table-row table:style-name="Tabla23.2">
          <table:table-cell table:style-name="Tabla23.A2" office:value-type="string">
            <text:p text:style-name="P22" loext:marker-style-name="T36"><text:span text:style-name="T36">14</text:span><text:span text:style-name="T36"/></text:p>
          </table:table-cell>
          <table:table-cell table:style-name="Tabla23.A2" office:value-type="string">
            <text:p text:style-name="P22" loext:marker-style-name="T36"><text:span text:style-name="T36">11</text:span><text:span text:style-name="T36"/></text:p>
          </table:table-cell>
          <table:table-cell table:style-name="Tabla23.A2" office:value-type="string">
            <text:p text:style-name="P22" loext:marker-style-name="T36"><text:span text:style-name="T36">1</text:span><text:span text:style-name="T36"/></text:p>
          </table:table-cell>
          <table:table-cell table:style-name="Tabla23.A2" office:value-type="string">
            <text:p text:style-name="P15" loext:marker-style-name="T36"><text:span text:style-name="T36">11</text:span><text:span text:style-name="T36"/></text:p>
          </table:table-cell>
          <table:table-cell table:style-name="Tabla23.A2" office:value-type="string">
            <text:p text:style-name="P15" loext:marker-style-name="T36"><text:span text:style-name="T36">286</text:span><text:span text:style-name="T36"/></text:p>
          </table:table-cell>
          <table:table-cell table:style-name="Tabla23.A2" office:value-type="string">
            <text:p text:style-name="P15" loext:marker-style-name="T36"><text:span text:style-name="T36">3432</text:span><text:span text:style-name="T36"/></text:p>
          </table:table-cell>
        </table:table-row>
      </table:table>
      <text:p text:style-name="Notas_20_APA"><text:span text:style-name="T50">Nota.</text:span> Elaboración Propia</text:p>
      <text:p text:style-name="P116" loext:marker-style-name="T35"><text:span text:style-name="T35">De acuerdo con los factores produciremos normalmente 11 polos al día y produciremos 3432 polos al año, con la cual abasteceremos al 3% de la demanda insatisfecha.</text:span><text:span text:style-name="T35"/></text:p>
      <text:list xml:id="list32343424173699" text:continue-list="list32343597364317" text:style-name="WWNum17">
        <text:list-item>
          <text:list>
            <text:list-item>
              <text:list>
                <text:list-item>
                  <text:h text:style-name="P84" text:outline-level="3"><text:bookmark text:name="_heading=h.4f1mdlm"/><text:bookmark-start text:name="_Toc106699146"/>Localización del proyecto<text:bookmark-end text:name="_Toc106699146"/></text:h>
                </text:list-item>
              </text:list>
            </text:list-item>
          </text:list>
        </text:list-item>
      </text:list>
      <text:p text:style-name="P116" loext:marker-style-name="T35"><text:span text:style-name="T35">Nuestra empresa se ubicará en la región de Ayacucho, elegimos tres centros comerciales: Vía 7, Polvos azules, 5 Continentes. Escogimos estos lugares debido a que el 70% de nuestros encuestados que compran polos dijeron que les gustaría que nuestra tienda esté en un centro comercial.</text:span><text:span text:style-name="T35"/></text:p>
      <text:list text:style-name="WWNum9">
        <text:list-item>
          <text:p text:style-name="P94">Macro localización<draw:frame draw:style-name="fr5" draw:name="image29.png" text:anchor-type="char" svg:x="8.165cm" svg:y="0.346cm" svg:width="2.683cm" svg:height="3.766cm" draw:z-index="6"><draw:image xlink:href="Pictures/10000000000001020000016F048A877F.png" xlink:type="simple" xlink:show="embed" xlink:actuate="onLoad" draw:mime-type="image/png"/><svg:desc>Mapa

Descripción generada automáticamente</svg:desc></draw:frame><draw:frame draw:style-name="fr5" draw:name="image18.png" text:anchor-type="char" svg:x="11.626cm" svg:y="0.083cm" svg:width="3.44cm" svg:height="4.03cm" draw:z-index="7"><draw:image xlink:href="Pictures/10000000000000D00000014038551B79.png" xlink:type="simple" xlink:show="embed" xlink:actuate="onLoad" draw:mime-type="image/png"/><svg:desc>Ayacucho (Perú) departamento: Principales atractivos</svg:desc></draw:frame></text:p>
        </text:list-item>
      </text:list>
      <text:p text:style-name="P116" loext:marker-style-name="T35"><text:span text:style-name="T35">Departamento: Ayacucho</text:span><text:span text:style-name="T35"/></text:p>
      <text:p text:style-name="P116" loext:marker-style-name="T35"><text:span text:style-name="T35">Provincia <text:s text:c="3"/>: Huamanga</text:span><text:span text:style-name="T35"/></text:p>
      <text:p text:style-name="P116" loext:marker-style-name="T35"><text:span text:style-name="T35">Distrito <text:s text:c="7"/>: Ayacucho</text:span><text:span text:style-name="T35"/></text:p>
      <text:p text:style-name="P116" loext:marker-style-name="T35"><text:span text:style-name="T35">Dirección <text:s text:c="3"/>: Jr. Asamblea 251 <text:s/></text:span><text:span text:style-name="T35"/></text:p>
      <text:p text:style-name="P187" loext:marker-style-name="T35"/>
      <text:p text:style-name="P116" loext:marker-style-name="T35"><text:span text:style-name="T35"><text:s text:c="10"/></text:span><text:span text:style-name="T35"/></text:p>
      <text:p text:style-name="P116" loext:marker-style-name="T35"><text:span text:style-name="T35"><text:s text:c="7"/></text:span><text:span text:style-name="T35"/></text:p>
      <text:list text:continue-numbering="true" text:style-name="WWNum9">
        <text:list-item>
          <text:p text:style-name="P94">Micro localización</text:p>
        </text:list-item>
      </text:list>
      <text:p text:style-name="P116" loext:marker-style-name="T35"><text:span text:style-name="T35">Para la localización del lugar de venta usamos el método cualitativo por puntos considerando la puntuación del 1 al 10. </text:span><text:span text:style-name="T35"/></text:p>
      <text:list text:style-name="WWNum11">
        <text:list-item>
          <text:p text:style-name="P95" loext:marker-style-name="T35"><text:span text:style-name="T35">Ubicación del local: por la cercanía al centro de la ciudad.</text:span><text:span text:style-name="T35"/></text:p>
        </text:list-item>
        <text:list-item>
          <text:p text:style-name="P95" loext:marker-style-name="T35"><text:span text:style-name="T35">Seguridad </text:span><text:span text:style-name="T35"/></text:p>
        </text:list-item>
        <text:list-item>
          <text:p text:style-name="P95" loext:marker-style-name="T35"><text:soft-page-break/><text:span text:style-name="T35">Costo de alquiler</text:span><text:span text:style-name="T35"/></text:p>
        </text:list-item>
        <text:list-item>
          <text:p text:style-name="P95" loext:marker-style-name="T35"><text:span text:style-name="T35">Tamaño del stand </text:span><text:span text:style-name="T35"/></text:p>
        </text:list-item>
        <text:list-item>
          <text:p text:style-name="P95" loext:marker-style-name="T35"><text:span text:style-name="T35">Facilidad de acceso </text:span><text:span text:style-name="T35"/></text:p>
        </text:list-item>
      </text:list>
      <text:p text:style-name="P116" loext:marker-style-name="T35"><text:span text:style-name="T35">Las alternativas propuestas son los siguientes centros comerciales: Vía 7 (Jr. Asamblea 251), 5 Continentes</text:span><text:span text:style-name="T54"> (</text:span><text:span text:style-name="T35">Jr. San Martín 350) y Polvos Azules (9 de diciembre 318). De acuerdo con el puntaje obtenido nuestra tienda “STAMP ADEK” estará en el Centro Comercial Vía 7. El procedimiento está en la TABLA 5 del ANEXO.</text:span></text:p>
      <text:list xml:id="list32343909519068" text:continue-list="list32343424173699" text:style-name="WWNum17">
        <text:list-item>
          <text:list>
            <text:list-item>
              <text:h text:style-name="P74" text:outline-level="2"><text:bookmark text:name="_heading=h.2u6wntf"/><text:bookmark-start text:name="_Toc106699147"/>Diseño del bien o servicio<text:bookmark-end text:name="_Toc106699147"/></text:h>
              <text:list>
                <text:list-item>
                  <text:h text:style-name="P84" text:outline-level="3"><text:bookmark text:name="_heading=h.19c6y18"/><text:bookmark-start text:name="_Toc106699148"/>Composición Físico – Química<text:bookmark-end text:name="_Toc106699148"/></text:h>
                </text:list-item>
              </text:list>
            </text:list-item>
          </text:list>
        </text:list-item>
      </text:list>
      <text:list text:style-name="WWNum8">
        <text:list-item>
          <text:p text:style-name="P96" loext:marker-style-name="T35"><text:span text:style-name="T35">Material principal: Algodón</text:span><text:span text:style-name="T35"/></text:p>
        </text:list-item>
        <text:list-item>
          <text:p text:style-name="P96" loext:marker-style-name="T35"><text:span text:style-name="T35">Composición: 100% Algodón 20/1</text:span><text:span text:style-name="T35"/></text:p>
        </text:list-item>
        <text:list-item>
          <text:p text:style-name="P96" loext:marker-style-name="T35"><text:span text:style-name="T35">Color: Gris, Vaquero, Blanco y Negro</text:span><text:span text:style-name="T35"/></text:p>
        </text:list-item>
        <text:list-item>
          <text:p text:style-name="P96" loext:marker-style-name="T35"><text:span text:style-name="T35">Talla: S M L XL</text:span><text:span text:style-name="T35"/></text:p>
        </text:list-item>
        <text:list-item>
          <text:p text:style-name="P96" loext:marker-style-name="T35"><text:span text:style-name="T35">Peso: 180 gramos.</text:span><draw:custom-shape text:anchor-type="char" draw:z-index="8" draw:name="Rectangle 1875474274" draw:style-name="gr24" draw:text-style-name="P214" svg:width="0.953cm" svg:height="0.555cm" svg:x="18.339cm" svg:y="12.13cm"><text:p text:style-name="Frame_20_contents"><text:span text:style-name="T58">15cm</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Rectangle 1875474275" draw:style-name="gr24" draw:text-style-name="P214" svg:width="0.953cm" svg:height="0.555cm" svg:x="18.339cm" svg:y="12.13cm"><text:p text:style-name="Frame_20_contents"><text:span text:style-name="T58">15cm</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text:p>
        </text:list-item>
        <text:list-item>
          <text:p text:style-name="P96" loext:marker-style-name="T35"><text:span text:style-name="T35">Calidad</text:span><text:span text:style-name="T54">:</text:span><text:span text:style-name="T35"> <text:s/>20/1 la más gruesa de su tipo.</text:span></text:p>
        </text:list-item>
        <text:list-item>
          <text:p text:style-name="P96" loext:marker-style-name="T35"><text:span text:style-name="T35">Variedad:</text:span><text:span text:style-name="T54"> </text:span><text:span text:style-name="T35">Mangas corta y larga, cuello redondo y en V.</text:span></text:p>
        </text:list-item>
      </text:list>
      <text:list text:continue-list="list32343909519068" text:style-name="WWNum17">
        <text:list-item>
          <text:list>
            <text:list-item>
              <text:list>
                <text:list-item>
                  <text:h text:style-name="P84" text:outline-level="3"><text:bookmark text:name="_heading=h.3tbugp1"/><text:bookmark-start text:name="_Toc106699149"/>Forma de funcionamiento<text:bookmark-end text:name="_Toc106699149"/></text:h>
                </text:list-item>
              </text:list>
            </text:list-item>
          </text:list>
        </text:list-item>
      </text:list>
      <text:p text:style-name="P116" loext:marker-style-name="T35"><text:span text:style-name="T35">El producto, polos con estampados personalizados, son polos de moda para varones como mujeres las cuales tienes estampados personalizados de lugares turísticos, fotos tomadas por los clientes en sus viajes, frases y diseños urbanos, tradicionales, religiosos y motivos personales.</text:span><text:span text:style-name="T35"/></text:p>
      <text:list xml:id="list32345211119827" text:continue-numbering="true" text:style-name="WWNum17">
        <text:list-item>
          <text:list>
            <text:list-item>
              <text:list>
                <text:list-item>
                  <text:h text:style-name="P84" text:outline-level="3"><text:bookmark text:name="_heading=h.28h4qwu"/><text:bookmark-start text:name="_Toc106699150"/>Forma de uso<text:bookmark-end text:name="_Toc106699150"/></text:h>
                </text:list-item>
              </text:list>
            </text:list-item>
          </text:list>
        </text:list-item>
      </text:list>
      <text:p text:style-name="P116" loext:marker-style-name="T35"><text:span text:style-name="T35">Para conservar la originalidad de la prenda se debe tener en cuenta algunas recomendaciones:</text:span><text:span text:style-name="T35"/></text:p>
      <text:list text:style-name="WWNum10">
        <text:list-item>
          <text:p text:style-name="P97" loext:marker-style-name="T35"><text:span text:style-name="T35">Lavar por el revés.</text:span><text:span text:style-name="T35"/></text:p>
        </text:list-item>
        <text:list-item>
          <text:p text:style-name="P97" loext:marker-style-name="T35"><text:span text:style-name="T35">No mezclar con otras prendas de color.</text:span><text:span text:style-name="T35"/></text:p>
        </text:list-item>
        <text:list-item>
          <text:p text:style-name="P97" loext:marker-style-name="T35"><text:span text:style-name="T35">No refregar ni escobillar sobre el estampado.</text:span><text:span text:style-name="T35"/></text:p>
        </text:list-item>
        <text:list-item>
          <text:p text:style-name="P97" loext:marker-style-name="T35"><text:span text:style-name="T35">No usar lavadora ni clorar.</text:span><text:span text:style-name="T35"/></text:p>
        </text:list-item>
        <text:list-item>
          <text:p text:style-name="P97" loext:marker-style-name="T35"><text:span text:style-name="T35">No exprimir, ni retorcer la prenda.</text:span><text:span text:style-name="T35"/></text:p>
        </text:list-item>
      </text:list>
      <text:list text:continue-list="list32345211119827" text:style-name="WWNum17">
        <text:list-item>
          <text:list>
            <text:list-item>
              <text:list>
                <text:list-item>
                  <text:h text:style-name="P84" text:outline-level="3"><text:bookmark text:name="_heading=h.nmf14n"/><text:bookmark-start text:name="_Toc106699151"/>Empaque<text:bookmark-end text:name="_Toc106699151"/></text:h>
                </text:list-item>
              </text:list>
            </text:list-item>
          </text:list>
        </text:list-item>
      </text:list>
      <text:p text:style-name="P116" loext:marker-style-name="T35"><text:span text:style-name="T35">El packaging del producto será una bolsa de papel ecológico con el logo de la empresa. Esta bolsa será hecho provenientes de bosques manejados de manera responsable y con tintas y pegamentos amigables con el medio ambiente.</text:span><draw:frame draw:style-name="fr5" draw:name="image7.jpg" text:anchor-type="char" svg:x="0cm" svg:y="-0.206cm" svg:width="3.455cm" svg:height="3.455cm" draw:z-index="12"><draw:image xlink:href="Pictures/100000000000012B0000012BBDAD5880.jpg" xlink:type="simple" xlink:show="embed" xlink:actuate="onLoad" draw:mime-type="image/jpeg"/><svg:desc>Texto, Carta

Descripción generada automáticamente</svg:desc></draw:frame><text:span text:style-name="T35"/></text:p>
      <text:p text:style-name="P187" loext:marker-style-name="T35"/>
      <text:list text:continue-numbering="true" text:style-name="WWNum17">
        <text:list-item>
          <text:list>
            <text:list-item>
              <text:list>
                <text:list-item>
                  <text:h text:style-name="P84" text:outline-level="3"><text:bookmark text:name="_heading=h.37m2jsg"/><text:bookmark-start text:name="_Toc106699152"/>Presentación<text:bookmark-end text:name="_Toc106699152"/></text:h>
                </text:list-item>
              </text:list>
            </text:list-item>
          </text:list>
        </text:list-item>
      </text:list>
      <text:p text:style-name="P116" loext:marker-style-name="T35"><text:span text:style-name="T35">Para ser transportado los polos serán vendidos en la bolsa de papel ecológico.</text:span><text:span text:style-name="T35"/></text:p>
      <text:p text:style-name="P187" loext:marker-style-name="T35"/>
      <text:list text:continue-numbering="true" text:style-name="WWNum17">
        <text:list-item>
          <text:list>
            <text:list-item>
              <text:list>
                <text:list-item>
                  <text:h text:style-name="P84" text:outline-level="3"><text:bookmark text:name="_heading=h.1mrcu09"/><text:bookmark-start text:name="_Toc106699153"/>Marca<text:bookmark-end text:name="_Toc106699153"/></text:h>
                </text:list-item>
              </text:list>
            </text:list-item>
          </text:list>
        </text:list-item>
      </text:list>
      <text:p text:style-name="P116" loext:marker-style-name="T35"><text:span text:style-name="T35">La marca del producto es: STAMPADEK que es la unión de la palabra en inglés “stamp” que significa sello, con los iniciales de los nombres de los emprendedores, Achalma, Diana, Elizabeth y Kely.</text:span><text:span text:style-name="T35"/></text:p>
      <text:list text:continue-numbering="true" text:style-name="WWNum17">
        <text:list-item>
          <text:list>
            <text:list-item>
              <text:list>
                <text:list-item>
                  <text:h text:style-name="P84" text:outline-level="3"><text:bookmark text:name="_heading=h.46r0co2"/><text:bookmark-start text:name="_Toc106699154"/><text:soft-page-break/>Logotipo e isotipo<text:bookmark-end text:name="_Toc106699154"/></text:h>
                </text:list-item>
              </text:list>
            </text:list-item>
          </text:list>
        </text:list-item>
      </text:list>
      <text:p text:style-name="P116" loext:marker-style-name="T35"><text:span text:style-name="T35">Para el Logotipo </text:span>se ha buscado que el logo sea la unión de Stamp y Adek en la parte inferior del Isotipo el cual está representado por dos personas con los sellos en la parte central de sus polos, con este Isotipo se trata de expresar lo que dice la marca. <draw:frame draw:style-name="fr5" draw:name="image36.png" text:anchor-type="char" svg:x="0.005cm" svg:y="0.018cm" svg:width="4.591cm" svg:height="4.551cm" draw:z-index="13"><draw:image xlink:href="Pictures/10000001000001440000014181E4885D.png" xlink:type="simple" xlink:show="embed" xlink:actuate="onLoad" draw:mime-type="image/png"/><svg:desc>Imagen que contiene flor

Descripción generada automáticamente</svg:desc></draw:frame></text:p>
      <text:p text:style-name="P116"/>
      <text:p text:style-name="P116"/>
      <text:p text:style-name="P116"/>
      <text:list text:continue-numbering="true" text:style-name="WWNum17">
        <text:list-item>
          <text:list>
            <text:list-item>
              <text:list>
                <text:list-item>
                  <text:h text:style-name="P84" text:outline-level="3"><text:bookmark text:name="_heading=h.2lwamvv"/><text:bookmark-start text:name="_Toc106699155"/>Bienes conexos<draw:frame draw:style-name="fr5" draw:name="image9.jpg" text:anchor-type="char" svg:x="12.069cm" svg:y="0.316cm" svg:width="4.87cm" svg:height="4.89cm" draw:z-index="14"><draw:image xlink:href="Pictures/100000000000015A0000015C6F75C6E7.jpg" xlink:type="simple" xlink:show="embed" xlink:actuate="onLoad" draw:mime-type="image/jpeg"/><svg:desc>Texto, Carta

Descripción generada automáticamente</svg:desc></draw:frame><draw:frame draw:style-name="fr5" draw:name="image8.png" text:anchor-type="char" svg:x="8.461cm" svg:y="0.316cm" svg:width="3.267cm" svg:height="4.763cm" draw:z-index="15"><draw:image xlink:href="Pictures/10000001000001B800000323F8829B62.png" xlink:type="simple" xlink:show="embed" xlink:actuate="onLoad" draw:mime-type="image/png"/><svg:desc>Imagen que contiene Texto

Descripción generada automáticamente</svg:desc></draw:frame><text:bookmark-end text:name="_Toc106699155"/></text:h>
                </text:list-item>
              </text:list>
            </text:list-item>
          </text:list>
        </text:list-item>
      </text:list>
      <text:p text:style-name="P116" loext:marker-style-name="T35"><text:span text:style-name="T35">Cada polo llevará una etiqueta en la parte posterior del cuello como parte de información del producto que está comprando además de que el cliente identificará nuestro producto con dichas etiquetas garantizando así la calidad del producto.</text:span><text:span text:style-name="T35"/></text:p>
      <text:p text:style-name="P187" loext:marker-style-name="T35"/>
      <text:list xml:id="list32344967854665" text:continue-numbering="true" text:style-name="WWNum17">
        <text:list-item>
          <text:list>
            <text:list-item>
              <text:h text:style-name="P74" text:outline-level="2"><text:bookmark text:name="_heading=h.111kx3o"/><text:bookmark-start text:name="_Toc106699156"/>Proceso de producción o prestación del servicio<text:bookmark-end text:name="_Toc106699156"/></text:h>
            </text:list-item>
          </text:list>
        </text:list-item>
      </text:list>
      <text:p text:style-name="P116"/>
      <text:p text:style-name="TÍTULO_20_Tablas_20_y_20_Figuras" loext:marker-style-name="T51"><text:bookmark-start text:name="_Toc106698909"/><text:span text:style-name="T51">Tabla </text:span><text:bookmark-end text:name="_Toc106698909"/><text:span text:style-name="T51"><text:sequence text:ref-name="refTable10" text:name="Table" text:formula="ooow:Table+1" style:num-format="1">11</text:sequence></text:span><text:span text:style-name="T51"><text:s/></text:span></text:p>
      <text:p text:style-name="TÍTULO_20_Tablas_20_y_20_Figuras">Proceso de Producción del Producto Polos Personalizados</text:p>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 loext:marker-style-name="T36"><text:span text:style-name="T36">Componentes (máquinas, personal y herramientas de control)</text:span><text:span text:style-name="T36"/></text:p>
          </table:table-cell>
          <table:table-cell table:style-name="Tabla24.A1" office:value-type="string">
            <text:p text:style-name="P3" loext:marker-style-name="T36"><text:span text:style-name="T36">Materias primas e insumos</text:span><text:span text:style-name="T36"/></text:p>
          </table:table-cell>
          <table:table-cell table:style-name="Tabla24.A1" office:value-type="string">
            <text:p text:style-name="P3" loext:marker-style-name="T36"><text:span text:style-name="T36">Procesos de transformación</text:span><text:span text:style-name="T36"/></text:p>
          </table:table-cell>
          <table:table-cell table:style-name="Tabla24.A1" office:value-type="string">
            <text:p text:style-name="P3" loext:marker-style-name="T36"><text:span text:style-name="T36">Producto</text:span><text:span text:style-name="T36"/></text:p>
          </table:table-cell>
        </table:table-row>
        <table:table-row table:style-name="Tabla24.2">
          <table:table-cell table:style-name="Tabla24.A2" office:value-type="string">
            <text:list text:style-name="WWNum12">
              <text:list-item>
                <text:p text:style-name="P29" loext:marker-style-name="T59"><text:span text:style-name="T59">Plancha plana</text:span><text:span text:style-name="T59"/></text:p>
              </text:list-item>
              <text:list-item>
                <text:p text:style-name="P29" loext:marker-style-name="T59"><text:span text:style-name="T59">Computadoras</text:span><text:span text:style-name="T59"/></text:p>
              </text:list-item>
              <text:list-item>
                <text:p text:style-name="P29" loext:marker-style-name="T59"><text:span text:style-name="T59">Impresora</text:span><text:span text:style-name="T59"/></text:p>
              </text:list-item>
              <text:list-item>
                <text:p text:style-name="P29" loext:marker-style-name="T59"><text:span text:style-name="T59">Pistola etiquetadora textil</text:span><text:span text:style-name="T59"/></text:p>
              </text:list-item>
              <text:list-item>
                <text:p text:style-name="P29" loext:marker-style-name="T59"><text:span text:style-name="T59">Tijeras</text:span><text:span text:style-name="T59"/></text:p>
              </text:list-item>
              <text:list-item>
                <text:p text:style-name="P29" loext:marker-style-name="T59"><text:span text:style-name="T59">Diseñador</text:span><text:span text:style-name="T59"/></text:p>
              </text:list-item>
              <text:list-item>
                <text:p text:style-name="P29" loext:marker-style-name="T59"><text:span text:style-name="T59">Vendedor</text:span><text:span text:style-name="T59"/></text:p>
              </text:list-item>
            </text:list>
          </table:table-cell>
          <table:table-cell table:style-name="Tabla24.B2" table:number-rows-spanned="2" office:value-type="string">
            <text:list text:continue-numbering="true" text:style-name="WWNum12">
              <text:list-item>
                <text:p text:style-name="P29" loext:marker-style-name="T59"><text:span text:style-name="T59">Polos de algodón</text:span><text:span text:style-name="T59"/></text:p>
              </text:list-item>
              <text:list-item>
                <text:p text:style-name="P29" loext:marker-style-name="T59"><text:span text:style-name="T59">Tintas pigmentadas</text:span><text:span text:style-name="T59"/></text:p>
              </text:list-item>
              <text:list-item>
                <text:p text:style-name="P29" loext:marker-style-name="T59"><text:span text:style-name="T59">Papel transfer</text:span><text:span text:style-name="T59"/></text:p>
              </text:list-item>
            </text:list>
          </table:table-cell>
          <table:table-cell table:style-name="Tabla24.B2" table:number-rows-spanned="2" office:value-type="string">
            <text:list text:continue-numbering="true" text:style-name="WWNum12">
              <text:list-item>
                <text:p text:style-name="P29" loext:marker-style-name="T59"><text:span text:style-name="T59">Elaboración de diseños</text:span><text:span text:style-name="T59"/></text:p>
              </text:list-item>
              <text:list-item>
                <text:p text:style-name="P29" loext:marker-style-name="T59"><text:span text:style-name="T59">Cargar tintas pigmentadas y papel transfer a la impresora</text:span><text:span text:style-name="T59"/></text:p>
              </text:list-item>
              <text:list-item>
                <text:p text:style-name="P29" loext:marker-style-name="T59"><text:span text:style-name="T59">Impresión de diseño</text:span><text:span text:style-name="T59"/></text:p>
              </text:list-item>
              <text:list-item>
                <text:p text:style-name="P29" loext:marker-style-name="T59"><text:span text:style-name="T59">Planchado</text:span><text:span text:style-name="T59"/></text:p>
              </text:list-item>
              <text:list-item>
                <text:p text:style-name="P29" loext:marker-style-name="T59"><text:span text:style-name="T59">Cortado</text:span><text:span text:style-name="T59"/></text:p>
              </text:list-item>
              <text:list-item>
                <text:p text:style-name="P29" loext:marker-style-name="T59"><text:span text:style-name="T59">Retiro en caliente</text:span><text:span text:style-name="T59"/></text:p>
              </text:list-item>
              <text:list-item>
                <text:p text:style-name="P29" loext:marker-style-name="T59"><text:span text:style-name="T59">Sellado y brillo</text:span><text:span text:style-name="T59"/></text:p>
              </text:list-item>
              <text:list-item>
                <text:p text:style-name="P29" loext:marker-style-name="T59"><text:span text:style-name="T59">Etiquetado</text:span><text:span text:style-name="T59"/></text:p>
              </text:list-item>
            </text:list>
          </table:table-cell>
          <table:table-cell table:style-name="Tabla24.B2" table:number-rows-spanned="2" office:value-type="string">
            <text:p text:style-name="P1" loext:marker-style-name="T36"><text:span text:style-name="T36">Polo de algodón con diseño personalizado</text:span><text:span text:style-name="T36"/></text:p>
          </table:table-cell>
        </table:table-row>
        <table:table-row table:style-name="Tabla24.3">
          <table:table-cell table:style-name="Tabla24.B2" office:value-type="string">
            <text:p text:style-name="P1" loext:marker-style-name="T36"><text:span text:style-name="T36"> </text:span><text:span text:style-name="T36"/></text:p>
          </table:table-cell>
          <table:covered-table-cell table:style-name="Tabla24.B2"/>
          <table:covered-table-cell table:style-name="Tabla24.B2"/>
          <table:covered-table-cell table:style-name="Tabla24.B2"/>
        </table:table-row>
      </table:table>
      <text:p text:style-name="P118"/>
      <text:p text:style-name="Notas_20_APA">Nota. Elaboración propia</text:p>
      <text:list text:continue-list="list32344967854665" text:style-name="WWNum17">
        <text:list-item>
          <text:list>
            <text:list-item>
              <text:list>
                <text:list-item>
                  <text:h text:style-name="P84" text:outline-level="3" loext:marker-style-name="T36"><text:bookmark text:name="_heading=h.3l18frh"/><text:bookmark-start text:name="_Toc106699157"/>Tecnología del Proceso<text:bookmark-end text:name="_Toc106699157"/> <text:span text:style-name="T36"/></text:h>
                </text:list-item>
              </text:list>
            </text:list-item>
          </text:list>
        </text:list-item>
      </text:list>
      <text:p text:style-name="P116"><text:line-break/></text:p>
      <text:p text:style-name="TÍTULO_20_Tablas_20_y_20_Figuras" loext:marker-style-name="T51"><text:bookmark-start text:name="_Toc106698910"/><text:span text:style-name="T51">Tabla </text:span><text:bookmark-end text:name="_Toc106698910"/><text:span text:style-name="T51"><text:sequence text:ref-name="refTable11" text:name="Table" text:formula="ooow:Table+1" style:num-format="1">12</text:sequence></text:span><text:span text:style-name="T51"><text:s text:c="2"/></text:span></text:p>
      <text:p text:style-name="TÍTULO_20_Tablas_20_y_20_Figuras">Tipo de Operaciones según el proceso y volumen.</text:p>
      <table:table table:name="Tabla25" table:style-name="Tabla25">
        <table:table-column table:style-name="Tabla25.A"/>
        <table:table-column table:style-name="Tabla25.B"/>
        <table:table-column table:style-name="Tabla25.C"/>
        <table:table-column table:style-name="Tabla25.D"/>
        <table:table-row table:style-name="Tabla25.1">
          <table:table-cell table:style-name="Tabla25.A1" office:value-type="string">
            <text:p text:style-name="P13"/>
          </table:table-cell>
          <table:table-cell table:style-name="Tabla25.A1" table:number-columns-spanned="3" office:value-type="string">
            <text:p text:style-name="P13" loext:marker-style-name="T53"><text:span text:style-name="T53">Tipo de operaciones</text:span><text:span text:style-name="T53"/></text:p>
          </table:table-cell>
          <table:covered-table-cell/>
          <table:covered-table-cell/>
        </table:table-row>
        <table:table-row table:style-name="Tabla25.2">
          <table:table-cell table:style-name="Tabla25.A2" office:value-type="string">
            <text:p text:style-name="P15">Proceso/volumen</text:p>
          </table:table-cell>
          <table:table-cell table:style-name="Tabla25.A2" office:value-type="string">
            <text:p text:style-name="P15">Único</text:p>
          </table:table-cell>
          <table:table-cell table:style-name="Tabla25.A2" office:value-type="string">
            <text:p text:style-name="P15">Intermitente</text:p>
          </table:table-cell>
          <table:table-cell table:style-name="Tabla25.A2" office:value-type="string">
            <text:p text:style-name="P15">Continuo</text:p>
          </table:table-cell>
        </table:table-row>
        <table:table-row table:style-name="Tabla25.3">
          <table:table-cell table:style-name="Tabla25.A2" office:value-type="string">
            <text:p text:style-name="P15">Uno</text:p>
          </table:table-cell>
          <table:table-cell table:style-name="Tabla25.A2" office:value-type="string">
            <text:p text:style-name="P15">Polo a pedido</text:p>
          </table:table-cell>
          <table:table-cell table:style-name="Tabla25.A2" office:value-type="string">
            <text:p text:style-name="P13"/>
          </table:table-cell>
          <table:table-cell table:style-name="Tabla25.A2" office:value-type="string">
            <text:p text:style-name="P13"/>
          </table:table-cell>
        </table:table-row>
        <table:table-row table:style-name="Tabla25.4">
          <table:table-cell table:style-name="Tabla25.A2" office:value-type="string">
            <text:p text:style-name="P15">Lote</text:p>
          </table:table-cell>
          <table:table-cell table:style-name="Tabla25.A2" office:value-type="string">
            <text:p text:style-name="P13"/>
          </table:table-cell>
          <table:table-cell table:style-name="Tabla25.A2" office:value-type="string">
            <text:p text:style-name="P15">Polos con diseño a ofrecer</text:p>
          </table:table-cell>
          <table:table-cell table:style-name="Tabla25.A2" office:value-type="string">
            <text:p text:style-name="P13"/>
          </table:table-cell>
        </table:table-row>
        <table:table-row table:style-name="Tabla25.5">
          <table:table-cell table:style-name="Tabla25.A2" office:value-type="string">
            <text:p text:style-name="P15">Serie</text:p>
          </table:table-cell>
          <table:table-cell table:style-name="Tabla25.A2" office:value-type="string">
            <text:p text:style-name="P13"/>
          </table:table-cell>
          <table:table-cell table:style-name="Tabla25.A2" office:value-type="string">
            <text:p text:style-name="P13"/>
          </table:table-cell>
          <table:table-cell table:style-name="Tabla25.A2" office:value-type="string">
            <text:p text:style-name="P13"/>
          </table:table-cell>
        </table:table-row>
        <table:table-row table:style-name="Tabla25.5">
          <table:table-cell table:style-name="Tabla25.A6" office:value-type="string">
            <text:p text:style-name="P15">Masivo</text:p>
          </table:table-cell>
          <table:table-cell table:style-name="Tabla25.A6" office:value-type="string">
            <text:p text:style-name="P13"/>
          </table:table-cell>
          <table:table-cell table:style-name="Tabla25.A6" office:value-type="string">
            <text:p text:style-name="P13"/>
          </table:table-cell>
          <table:table-cell table:style-name="Tabla25.A6" office:value-type="string">
            <text:p text:style-name="P13"/>
          </table:table-cell>
        </table:table-row>
      </table:table>
      <text:p text:style-name="Notas_20_APA"><text:span text:style-name="T50">Nota.</text:span> Elaboración propia</text:p>
      <text:p text:style-name="P116" loext:marker-style-name="T35"><text:span text:style-name="T35">Tendrá un volumen correspondiente a lote y proceso intermitente cuando se elaboren y oferten diseños propios de la tienda.</text:span><text:span text:style-name="T35"/></text:p>
      <text:p text:style-name="P187" loext:marker-style-name="T35"/>
      <text:p text:style-name="P187" loext:marker-style-name="T35"><text:soft-page-break/></text:p>
      <text:p text:style-name="P187" loext:marker-style-name="T35"><text:bookmark-start text:name="_heading=h.206ipza"/><draw:frame draw:style-name="fr4" draw:name="image15.png" text:anchor-type="char" svg:x="3.164cm" svg:y="2.746cm" svg:width="12.615cm" svg:height="7.98cm" draw:z-index="16"><draw:image xlink:href="Pictures/100000010000036300000262132C89DD.png" xlink:type="simple" xlink:show="embed" xlink:actuate="onLoad" draw:mime-type="image/png"/><svg:desc>Diagrama

Descripción generada automáticamente</svg:desc></draw:frame><draw:custom-shape text:anchor-type="char" draw:z-index="17" draw:name="Cuadro de texto 31" draw:style-name="gr6" draw:text-style-name="P212" svg:width="12.616cm" svg:height="2.652cm" svg:x="0.572cm" svg:y="0cm"><text:p text:style-name="TÍTULO_20_Tablas_20_y_20_Figuras" loext:marker-style-name="T51"><text:span text:style-name="T51">Figura </text:span><text:span text:style-name="T51"><text:sequence text:ref-name="refFigure0" text:name="Figure" text:formula="ooow:Figure+1" style:num-format="1">1</text:sequence></text:span><text:span text:style-name="T51"><text:s/></text:span></text:p><text:p text:style-name="TÍTULO_20_Tablas_20_y_20_Figuras" loext:marker-style-name="T60">Identificación y mapeo de procesos: Tienda física de polos personalizados</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eading=h.206ipza"/></text:p>
      <text:p text:style-name="P116"/>
      <text:list text:continue-numbering="true" text:style-name="WWNum17">
        <text:list-item>
          <text:list>
            <text:list-item>
              <text:list>
                <text:list-item>
                  <text:h text:style-name="P84" text:outline-level="3" loext:marker-style-name="T36"><text:bookmark text:name="_heading=h.4k668n3"/><text:bookmark-start text:name="_Toc106699158"/>Diagrama de flujo de procesos<text:bookmark-end text:name="_Toc106699158"/><text:span text:style-name="T36"/></text:h>
                </text:list-item>
              </text:list>
            </text:list-item>
          </text:list>
        </text:list-item>
      </text:list>
      <text:p text:style-name="TÍTULO_20_Tablas_20_y_20_Figuras" loext:marker-style-name="T51"><text:span text:style-name="T51">Figura </text:span><text:span text:style-name="T51"><text:sequence text:ref-name="refFigure1" text:name="Figure" text:formula="ooow:Figure+1" style:num-format="1">2</text:sequence></text:span><text:span text:style-name="T51"><text:s/></text:span></text:p>
      <text:p text:style-name="TÍTULO_20_Tablas_20_y_20_Figuras">Flujograma de estampado</text:p>
      <text:p text:style-name="P116" loext:marker-style-name="T36"><draw:frame draw:style-name="fr3" draw:name="image35.png" text:anchor-type="as-char" svg:width="10.137cm" svg:height="10.562cm" draw:z-index="0"><draw:image xlink:href="Pictures/1000000100000370000004367B4B8D70.png" xlink:type="simple" xlink:show="embed" xlink:actuate="onLoad" draw:mime-type="image/png"/><svg:desc>Diagrama

Descripción generada automáticamente</svg:desc></draw:frame></text:p>
      <text:p text:style-name="P116"/>
      <text:p text:style-name="P116" loext:marker-style-name="T35"><text:span text:style-name="T35">Debido a que el 66% de las personas encuestadas prefieren una compra tanto virtual y presencial, se ha realizado el siguiente flujograma para una venta virtual, mediante nuestra plataforma.</text:span><text:span text:style-name="T35"/></text:p>
      <text:list xml:id="list32343534967144" text:continue-numbering="true" text:style-name="WWNum17">
        <text:list-item>
          <text:list>
            <text:list-item>
              <text:h text:style-name="P74" text:outline-level="2"><text:bookmark-start text:name="_heading=h.2zbgiuw"/><text:bookmark-start text:name="_Toc106699159"/><draw:g text:anchor-type="char" draw:z-index="15" draw:name="Group 1875474271" draw:style-name="gr8"><draw:g draw:style-name="gr2"><draw:custom-shape draw:name="Rectangle 2" draw:style-name="gr9" draw:text-style-name="P210" svg:width="18.987cm" svg:height="9.773cm" svg:x="0cm" svg:y="1.037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draw:g draw:style-name="gr2"><draw:g draw:style-name="gr2"><draw:custom-shape draw:name="Rectangle 6" draw:style-name="gr10" draw:text-style-name="P211" svg:width="18.987cm" svg:height="9.773cm" svg:x="0cm" svg:y="1.037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11" draw:text-style-name="P211" svg:width="2.109cm" svg:height="1.057cm" svg:x="0.471cm" svg:y="1.355cm"><text:p text:style-name="Standard">CAJ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12" draw:text-style-name="P211" svg:width="14.946cm" svg:height="0.985cm" svg:x="2.623cm" svg:y="5.699cm"><text:p text:style-name="Standard">E X H I B I D O R <text:s text:c="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13" draw:text-style-name="P211" svg:width="0.92cm" svg:height="5.414cm" svg:x="17.814cm" svg:y="1.355cm"><text:p text:style-name="Standard">E</text:p><text:p text:style-name="Standard">X</text:p><text:p text:style-name="Standard">H</text:p><text:p text:style-name="Standard">I</text:p><text:p text:style-name="Standard">B</text:p><text:p text:style-name="Standard">I</text:p><text:p text:style-name="Standard">D</text:p><text:p text:style-name="Standard">O</text:p><text:p text:style-name="Standard">R </text:p><text:p text:style-name="Standard">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14" draw:text-style-name="P211" svg:width="3.95cm" svg:height="1.359cm" svg:x="0.466cm" svg:y="3.401cm"><text:p text:style-name="Standard">VESTIDO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15" draw:text-style-name="P211" svg:width="5.134cm" svg:height="1.673cm" svg:x="7.555cm" svg:y="3.401cm"><text:p text:style-name="Standard">MUEBLE PLANO</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Rounded Corners 12" draw:style-name="gr16" draw:text-style-name="P211" svg:width="12.658cm" svg:height="0.867cm" svg:x="3.376cm" svg:y="1.429cm"><text:p text:style-name="Standard">MOSTRADOR</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13" draw:style-name="gr17" draw:text-style-name="P211" svg:width="16.317cm" svg:height="2.109cm" svg:x="2.491cm" svg:y="7.585cm"><text:p text:style-name="Standard">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18" draw:text-style-name="P213" svg:width="2.269cm" svg:height="1.003cm" svg:x="2.865cm" svg:y="8.03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15" draw:style-name="gr19" draw:text-style-name="P211" svg:width="4.058cm" svg:height="0.826cm" svg:x="8.834cm" svg:y="6.9cm"><text:p text:style-name="Standard">ÁREA DE PRODUCCIÓ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Shape 17" draw:style-name="gr20" draw:text-style-name="P214" svg:width="0.736cm" svg:height="0.766cm" svg:x="3.528cm" svg:y="8.202cm"><draw:image xlink:href="Pictures/10000001000001800000018008118492.png" xlink:type="simple" xlink:show="embed" xlink:actuate="onLoad" draw:mime-type="image/png"><text:p/></draw:image><svg:desc>Paleta</svg:desc></draw:frame><draw:custom-shape draw:name="Rectangle 16" draw:style-name="gr21" draw:text-style-name="P213" svg:width="2.269cm" svg:height="1.003cm" svg:x="5.56cm" svg:y="8.082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gr22" draw:text-style-name="P213" svg:width="2.271cm" svg:height="1.003cm" svg:x="8.209cm" svg:y="8.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gr21" draw:text-style-name="P213" svg:width="2.269cm" svg:height="1.003cm" svg:x="10.806cm" svg:y="8.07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21" draw:text-style-name="P213" svg:width="2.269cm" svg:height="1.003cm" svg:x="13.499cm" svg:y="8.04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 draw:style-name="gr21" draw:text-style-name="P213" svg:width="2.269cm" svg:height="1.003cm" svg:x="16.191cm" svg:y="8.04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3" draw:style-name="gr20" draw:text-style-name="P214" svg:width="0.736cm" svg:height="0.766cm" svg:x="6.278cm" svg:y="8.19cm"><draw:image xlink:href="Pictures/100000010000018000000180C7A7B6C0.png" xlink:type="simple" xlink:show="embed" xlink:actuate="onLoad" draw:mime-type="image/png"><text:p/></draw:image><svg:desc>Fax</svg:desc></draw:frame><draw:frame draw:name="Shape 24" draw:style-name="gr20" draw:text-style-name="P214" svg:width="0.81cm" svg:height="0.84cm" svg:x="8.961cm" svg:y="8.205cm"><draw:image xlink:href="Pictures/1000000100000180000001802E33A39B.png" xlink:type="simple" xlink:show="embed" xlink:actuate="onLoad" draw:mime-type="image/png"><text:p/></draw:image><svg:desc>Cortar</svg:desc></draw:frame><draw:frame draw:name="Shape 25" draw:style-name="gr20" draw:text-style-name="P214" svg:width="1.041cm" svg:height="1.084cm" svg:x="11.381cm" svg:y="8.015cm"><draw:image xlink:href="Pictures/1000000100000180000001808C9C3419.png" xlink:type="simple" xlink:show="embed" xlink:actuate="onLoad" draw:mime-type="image/png"><text:p/></draw:image><svg:desc>Escáner</svg:desc></draw:frame><draw:frame draw:name="Shape 26" draw:style-name="gr20" draw:text-style-name="P214" svg:width="0.754cm" svg:height="0.784cm" svg:x="14.243cm" svg:y="8.17cm"><draw:image xlink:href="Pictures/1000000100000180000001801CB98219.png" xlink:type="simple" xlink:show="embed" xlink:actuate="onLoad" draw:mime-type="image/png"><text:p/></draw:image><svg:desc>Sello</svg:desc></draw:frame><draw:frame draw:name="Shape 27" draw:style-name="gr20" draw:text-style-name="P214" svg:width="0.879cm" svg:height="0.914cm" svg:x="16.845cm" svg:y="8.112cm"><draw:image xlink:href="Pictures/10000001000001800000018004236217.png" xlink:type="simple" xlink:show="embed" xlink:actuate="onLoad" draw:mime-type="image/png"><text:p/></draw:image><svg:desc>Etiqueta</svg:desc></draw:frame></draw:g><draw:custom-shape draw:name="Rectangle 22" draw:style-name="gr23" draw:text-style-name="P210" svg:width="0.526cm" svg:height="5.885cm" svg:x="17.972cm" svg:y="1.418cm"><text:p text:style-name="Standard">EXHIBIDOR</text:p><text:p text:style-name="Standard"><text:s/>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end text:name="_heading=h.2zbgiuw"/>Distribución de planta e instalaciones<text:bookmark-end text:name="_Toc106699159"/></text:h>
            </text:list-item>
          </text:list>
        </text:list-item>
      </text:list>
      <text:p text:style-name="P187" loext:marker-style-name="T35"/>
      <text:p text:style-name="P187" loext:marker-style-name="T35"/>
      <text:p text:style-name="P187" loext:marker-style-name="T35"/>
      <text:p text:style-name="P187" loext:marker-style-name="T35"/>
      <text:p text:style-name="P187" loext:marker-style-name="T35"/>
      <text:p text:style-name="P187" loext:marker-style-name="T35"/>
      <text:p text:style-name="P187" loext:marker-style-name="T35"/>
      <text:p text:style-name="P187" loext:marker-style-name="T35"/>
      <text:p text:style-name="P187" loext:marker-style-name="T35"/>
      <text:p text:style-name="P189" loext:marker-style-name="T62"><draw:custom-shape text:anchor-type="char" draw:z-index="16" draw:name="Rectangle 1875474277" draw:style-name="gr7" draw:text-style-name="P212" svg:width="1.034cm" svg:height="1.041cm" svg:x="13.723cm" svg:y="0.459cm"><text:p text:style-name="Frame_20_contents">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13">
        <text:list-item>
          <text:p text:style-name="P98" loext:marker-style-name="T35"><text:span text:style-name="T35"><text:s/>DISEÑO es el proceso donde se crea y perfecciona las ideas en imágenes para el estampado del polo.</text:span><text:span text:style-name="T35"/></text:p>
        </text:list-item>
        <text:list-item>
          <text:p text:style-name="P98" loext:marker-style-name="T35"><text:span text:style-name="T35">IMPRESIÓN consiste en materializar la idea del diseño en el papel transfer.</text:span><text:span text:style-name="T35"/></text:p>
        </text:list-item>
        <text:list-item>
          <text:p text:style-name="P98" loext:marker-style-name="T35"><text:span text:style-name="T35">CORTADO luego se procede a cortar el papel transfer de acuerdo con la silueta del diseño para posteriormente, se realice el </text:span><text:span text:style-name="T35"/></text:p>
        </text:list-item>
        <text:list-item>
          <text:p text:style-name="P98" loext:marker-style-name="T35"><text:span text:style-name="T35">PLANCHADO con la ayuda de la maquina plancha plana, donde el diseño queda,</text:span><text:span text:style-name="T35"/></text:p>
        </text:list-item>
        <text:list-item>
          <text:p text:style-name="P98" loext:marker-style-name="T35"><text:span text:style-name="T35">SELLADO en el polo, finalmente se hace el,</text:span><text:span text:style-name="T35"/></text:p>
        </text:list-item>
        <text:list-item>
          <text:p text:style-name="P98" loext:marker-style-name="T35"><text:span text:style-name="T35">ETIQUETADO del polo para hacer algunas recomendaciones y hacer conocer nuestra marca.</text:span><text:span text:style-name="T35"/></text:p>
        </text:list-item>
      </text:list>
      <text:list text:continue-list="list32343534967144" text:style-name="WWNum17">
        <text:list-item>
          <text:list>
            <text:list-item>
              <text:h text:style-name="P74" text:outline-level="2"><text:bookmark text:name="_heading=h.1egqt2p"/><text:bookmark-start text:name="_Toc106699160"/>Diseño del trabajo<text:bookmark-end text:name="_Toc106699160"/></text:h>
            </text:list-item>
          </text:list>
        </text:list-item>
      </text:list>
      <text:p text:style-name="P116">Personal para el proceso productivo:</text:p>
      <text:p text:style-name="TÍTULO_20_Tablas_20_y_20_Figuras" loext:marker-style-name="T51"><text:bookmark-start text:name="_Toc106698911"/><text:span text:style-name="T51">Tabla </text:span><text:bookmark-end text:name="_Toc106698911"/><text:span text:style-name="T51"><text:sequence text:ref-name="refTable12" text:name="Table" text:formula="ooow:Table+1" style:num-format="1">13</text:sequence></text:span><text:span text:style-name="T51"><text:s/></text:span></text:p>
      <text:p text:style-name="TÍTULO_20_Tablas_20_y_20_Figuras">Personal de Producción</text:p>
      <table:table table:name="Tabla26" table:style-name="Tabla26">
        <table:table-column table:style-name="Tabla26.A"/>
        <table:table-column table:style-name="Tabla26.B"/>
        <table:table-column table:style-name="Tabla26.C"/>
        <text:soft-page-break/>
        <table:table-row table:style-name="Tabla26.1">
          <table:table-cell table:style-name="Tabla26.A1" office:value-type="string">
            <text:p text:style-name="P13" loext:marker-style-name="T53"><text:span text:style-name="T53">Cargo</text:span><text:span text:style-name="T53"/></text:p>
          </table:table-cell>
          <table:table-cell table:style-name="Tabla26.A1" office:value-type="string">
            <text:p text:style-name="P41" loext:marker-style-name="T53"/>
          </table:table-cell>
          <table:table-cell table:style-name="Tabla26.A1" office:value-type="string">
            <text:p text:style-name="P13" loext:marker-style-name="T53"><text:span text:style-name="T53">N ° de personas</text:span><text:span text:style-name="T53"/></text:p>
          </table:table-cell>
        </table:table-row>
        <table:table-row table:style-name="Tabla26.1">
          <table:table-cell table:style-name="Tabla26.A2" office:value-type="string">
            <text:p text:style-name="P15">Diseñador gráfico</text:p>
          </table:table-cell>
          <table:table-cell table:style-name="Tabla26.A2" office:value-type="string">
            <text:p text:style-name="P13"/>
          </table:table-cell>
          <table:table-cell table:style-name="Tabla26.A2" office:value-type="string">
            <text:p text:style-name="P13">1</text:p>
          </table:table-cell>
        </table:table-row>
        <table:table-row table:style-name="Tabla26.1">
          <table:table-cell table:style-name="Tabla26.A2" office:value-type="string">
            <text:p text:style-name="P15">Encargado de estampando </text:p>
          </table:table-cell>
          <table:table-cell table:style-name="Tabla26.A2" office:value-type="string">
            <text:p text:style-name="P13"/>
          </table:table-cell>
          <table:table-cell table:style-name="Tabla26.A2" office:value-type="string">
            <text:p text:style-name="P13">1</text:p>
          </table:table-cell>
        </table:table-row>
        <table:table-row table:style-name="Tabla26.1">
          <table:table-cell table:style-name="Tabla26.A4" office:value-type="string">
            <text:p text:style-name="P15">Total </text:p>
          </table:table-cell>
          <table:table-cell table:style-name="Tabla26.A4" office:value-type="string">
            <text:p text:style-name="P13"/>
          </table:table-cell>
          <table:table-cell table:style-name="Tabla26.A4" office:value-type="string">
            <text:p text:style-name="P13">2</text:p>
          </table:table-cell>
        </table:table-row>
      </table:table>
      <text:p text:style-name="Notas_20_APA"><text:s/><text:span text:style-name="T50">Nota.</text:span> Elaboración propia</text:p>
      <text:list text:continue-numbering="true" text:style-name="WWNum17">
        <text:list-item>
          <text:h text:style-name="P73" text:outline-level="1"><text:bookmark-start text:name="_Toc106699161"/>Capítulo IV.- Estudio Administrativo y Legal<text:bookmark-end text:name="_Toc106699161"/></text:h>
          <text:list>
            <text:list-item>
              <text:h text:style-name="P77" text:outline-level="2"><text:bookmark text:name="_heading=h.2dlolyb"/><text:bookmark-start text:name="_Toc106699162"/>Estudio legal<text:bookmark-end text:name="_Toc106699162"/></text:h>
            </text:list-item>
          </text:list>
        </text:list-item>
      </text:list>
      <text:p text:style-name="P116" loext:marker-style-name="T35"><text:bookmark text:name="_heading=h.sqyw64"/><text:span text:style-name="T35">Nuestra empresa cuyo nombre comercial es “</text:span><text:span text:style-name="T54">STAMP ADEK</text:span><text:span text:style-name="T35">” estará definida como </text:span><text:span text:style-name="T54">PERSONA JURÍDICA </text:span><text:span text:style-name="T35">y será aperturada por: ACHALMA MENDOZA Edison, GUTIERREZ LUCANA Diana y HUAMÁN CENTENO Kely, con la cual podemos ejercer la actividad de estampado personalizado y venta de polos de algodón.</text:span></text:p>
      <text:list text:continue-numbering="true" text:style-name="WWNum17">
        <text:list-item>
          <text:list>
            <text:list-item>
              <text:list>
                <text:list-item>
                  <text:h text:style-name="P86" text:outline-level="3"><text:bookmark text:name="_heading=h.3cqmetx"/><text:bookmark-start text:name="_Toc106699163"/>Estructura societaria de la empresa<text:bookmark-end text:name="_Toc106699163"/></text:h>
                </text:list-item>
              </text:list>
            </text:list-item>
          </text:list>
        </text:list-item>
      </text:list>
      <text:p text:style-name="P116" loext:marker-style-name="T35"><text:span text:style-name="T35">El aspecto que tendrá nuestra empresa es de SOCIEDAD ANÓNIMA CERRADA (S.A.C.) que estará integrada por los 3 integrantes del grupo quienes seremos los socios, como tal está afecta a los siguientes requisitos:</text:span><text:span text:style-name="T35"/></text:p>
      <text:list xml:id="list32343254507665" text:continue-numbering="true" text:style-name="WWNum17">
        <text:list-item>
          <text:list>
            <text:list-item>
              <text:list>
                <text:list-item>
                  <text:h text:style-name="P86" text:outline-level="3"><text:bookmark text:name="_heading=h.1rvwp1q"/><text:bookmark-start text:name="_Toc106699164"/>Constitución de la Empresa<text:bookmark-end text:name="_Toc106699164"/> </text:h>
                </text:list-item>
              </text:list>
            </text:list-item>
          </text:list>
        </text:list-item>
      </text:list>
      <text:list text:style-name="WWNum23">
        <text:list-item>
          <text:p text:style-name="P121" loext:marker-style-name="T35"><text:span text:style-name="T54">Denominación Social</text:span><text:span text:style-name="T35">: STAMP ADEK S.A.C.</text:span></text:p>
        </text:list-item>
        <text:list-item>
          <text:p text:style-name="P121" loext:marker-style-name="T35"><text:span text:style-name="T54">Domicilio y plazo de funcionamiento:</text:span><text:span text:style-name="T35"> Jr. Asamblea 251 Stand No 148; con plazo indefinido.</text:span></text:p>
        </text:list-item>
        <text:list-item>
          <text:p text:style-name="P121" loext:marker-style-name="T54"><text:span text:style-name="T54">Número de acciones:</text:span><text:span text:style-name="T35"> el número de accionistas 3 personas naturales.</text:span></text:p>
        </text:list-item>
      </text:list>
      <text:p text:style-name="P118"><text:s text:c="4"/>Proceso de formalización del negocio</text:p>
      <text:p text:style-name="P119"><text:span text:style-name="T47">1. </text:span><text:span text:style-name="T52">Búsqueda y reserva de nombre</text:span><text:span text:style-name="T47">.</text:span><text:span text:style-name="T49"> S</text:span>e debe realizar la búsqueda del nombre “STAMP ADEK S.A.C” en la SUNARP. </text:p>
      <text:p text:style-name="P118"><text:span text:style-name="T47">2. </text:span><text:span text:style-name="T52">Elaboración de la Minuta de Constitución de la Empresa o Sociedad</text:span><text:span text:style-name="T47">.</text:span> A través de este documento el titular de la empresa o los miembros de la sociedad “STAMP ADEK S.A.C” manifiestan su voluntad de constituir la persona jurídica. </text:p>
      <text:p text:style-name="P118"><text:span text:style-name="T47">3. </text:span><text:span text:style-name="T52">Aporte de capital.</text:span> Podrá aportarse dinero o bienes (inmuebles o muebles, en estos últimos se entienden los derechos de crédito) los que se acreditarán con la inscripción de la transferencia a favor de la empresa o sociedad.</text:p>
      <text:p text:style-name="P119"><text:span text:style-name="T47">4. </text:span><text:span text:style-name="T52">Elaboración de Escritura Pública ante el notario.</text:span> Se generará la Escritura Pública de constitución de la empresa “STAMP ADEK S.A.C</text:p>
      <text:p text:style-name="P119"><text:span text:style-name="T47">5. </text:span><text:span text:style-name="T52">Inscripción de la empresa o sociedad en el Registro de Personas Jurídicas de la Sunarp. </text:span>En la SUNARP obtendrá un asiento registral de inscripción de la empresa o sociedad como persona jurídica “STAMP ADEK S.A.C”. </text:p>
      <text:p text:style-name="P119"><text:bookmark text:name="_heading=h.4bvk7pj"/><text:span text:style-name="T47">6</text:span><text:span text:style-name="T52">. Inscripción al RUC para Persona Jurídica</text:span><text:span text:style-name="T47">.</text:span><text:span text:style-name="T52"> </text:span>El RUC contiene los datos de identificación de las actividades económicas de “STAMP ADEK S.A.C”. Registro de marca y logo. <text:span text:style-name="T35">El registro de la marca tiene una vigencia de 10 años y un costo de 534,99 soles en el Banco de la Nación o Banco de Crédito usando el código 201000562.</text:span></text:p>
      <text:list text:continue-list="list32343254507665" text:style-name="WWNum17">
        <text:list-item>
          <text:list>
            <text:list-item>
              <text:list>
                <text:list-item>
                  <text:h text:style-name="P86" text:outline-level="3"><text:bookmark text:name="_heading=h.2r0uhxc"/><text:bookmark-start text:name="_Toc106699165"/>Licencia de funcionamiento<text:bookmark-end text:name="_Toc106699165"/></text:h>
                </text:list-item>
              </text:list>
            </text:list-item>
          </text:list>
        </text:list-item>
      </text:list>
      <text:p text:style-name="P116" loext:marker-style-name="T35"><text:span text:style-name="T35"><text:s/>El centro comercial VÍA 7 en el cual la empresa tendrá un stand ya cuenta con la licencia de funcionamiento.</text:span><text:span text:style-name="T35"/></text:p>
      <text:list text:continue-numbering="true" text:style-name="WWNum17">
        <text:list-item>
          <text:list>
            <text:list-item>
              <text:h text:style-name="P83" text:outline-level="2"><text:bookmark text:name="_heading=h.1664s55"/><text:bookmark-start text:name="_Toc106699166"/>Estudio organizacional.<text:bookmark-end text:name="_Toc106699166"/></text:h>
              <text:list>
                <text:list-item>
                  <text:h text:style-name="P86" text:outline-level="3"><text:bookmark text:name="_heading=h.3q5sasy"/><text:bookmark-start text:name="_Toc106699167"/>Tamaño de la empresa.<text:bookmark-end text:name="_Toc106699167"/></text:h>
                </text:list-item>
              </text:list>
            </text:list-item>
          </text:list>
        </text:list-item>
      </text:list>
      <text:p text:style-name="P119">Nuestra empresa será constituida como una <text:span text:style-name="T52">Microempresa</text:span> debido a que cumplimos con los requisitos establecidos.</text:p>
      <text:list xml:id="list32344552349177" text:continue-numbering="true" text:style-name="WWNum17">
        <text:list-item>
          <text:list>
            <text:list-item>
              <text:list>
                <text:list-item>
                  <text:h text:style-name="P86" text:outline-level="3"><text:bookmark text:name="_heading=h.25b2l0r"/><text:bookmark-start text:name="_Toc106699168"/>Objetivos del área de organización<text:bookmark-end text:name="_Toc106699168"/></text:h>
                </text:list-item>
              </text:list>
            </text:list-item>
          </text:list>
        </text:list-item>
      </text:list>
      <text:p text:style-name="P124" loext:marker-style-name="T52"><text:span text:style-name="T52">Objetivo general:</text:span><text:span text:style-name="T52"/></text:p>
      <text:p text:style-name="P116" loext:marker-style-name="T54"><text:span text:style-name="T35">Organizar y gestionar al personal, con el fin que contribuya al éxito de la empresa, bajo una estructura organizacional y operando dentro de la formalización.</text:span><text:span text:style-name="T54"/></text:p>
      <text:p text:style-name="P124" loext:marker-style-name="T52"><text:span text:style-name="T52">Objetivos específicos:</text:span><text:span text:style-name="T52"/></text:p>
      <text:list text:style-name="WWNum22">
        <text:list-item>
          <text:p text:style-name="P122" loext:marker-style-name="T35"><text:span text:style-name="T35">Determinar la estructura organizacional según el tipo de negocio.</text:span><text:span text:style-name="T35"/></text:p>
        </text:list-item>
        <text:list-item>
          <text:p text:style-name="P122" loext:marker-style-name="T35"><text:span text:style-name="T35">Definir las políticas de reclutamiento y selección más adecuados que permitan captar a los mejores perfiles para el negocio. </text:span><text:span text:style-name="T35"/></text:p>
        </text:list-item>
        <text:list-item>
          <text:p text:style-name="P122" loext:marker-style-name="T35"><text:span text:style-name="T35">Evaluar al personal, para identificar tanto fortalezas y debilidades, estableciendo de esa manera planes que permitan reforzar esa fortaleza y trabajar en reducir las debilidades.</text:span><text:span text:style-name="T35"/></text:p>
        </text:list-item>
      </text:list>
      <text:p text:style-name="P188" loext:marker-style-name="T35"><text:soft-page-break/></text:p>
      <text:list text:continue-list="list32344552349177" text:style-name="WWNum17">
        <text:list-item>
          <text:list>
            <text:list-item>
              <text:list>
                <text:list-item>
                  <text:h text:style-name="P86" text:outline-level="3"><text:bookmark text:name="_heading=h.kgcv8k"/><text:bookmark-start text:name="_Toc106699169"/>Estructura organizacional:<text:bookmark-end text:name="_Toc106699169"/></text:h>
                </text:list-item>
              </text:list>
            </text:list-item>
          </text:list>
        </text:list-item>
      </text:list>
      <text:p text:style-name="P118">StampAdek S.A.C tendrá el siguiente organigrama:</text:p>
      <text:p text:style-name="P118" loext:marker-style-name="T52"><draw:g text:anchor-type="as-char" draw:z-index="2" draw:name="Group 1875474272" draw:style-name="gr25"><draw:g draw:style-name="gr2"><draw:custom-shape draw:name="Rectangle 29" draw:style-name="gr26" draw:text-style-name="P210" svg:width="15.001cm" svg:height="7.6cm" svg:x="0cm" svg:y="0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Shape 30" draw:style-name="gr27" draw:text-style-name="P210" svg:width="0.475cm" svg:height="1.287cm" svg:x="8.297cm" svg:y="4.26cm"><text:p/><draw:enhanced-geometry draw:mirror-horizontal="false" draw:mirror-vertical="false" drawooo:sub-view-size="120000 120000" draw:text-areas="0 0 ?f0 ?f1" svg:viewBox="0 0 0 0" draw:type="ooxml-non-primitive" draw:enhanced-path="M 0 0 L 0 131180 131180 131180 N"><draw:equation draw:name="f0" draw:formula="logwidth"/><draw:equation draw:name="f1" draw:formula="logheight"/></draw:enhanced-geometry></draw:custom-shape><draw:custom-shape draw:name="Freeform: Shape 31" draw:style-name="gr28" draw:text-style-name="P210" svg:width="2.063cm" svg:height="0.927cm" svg:x="7.502cm" svg:y="2.503cm"><text:p/><draw:enhanced-geometry draw:mirror-horizontal="false" draw:mirror-vertical="false" drawooo:sub-view-size="120000 120000" draw:text-areas="0 0 ?f0 ?f1" svg:viewBox="0 0 0 0" draw:type="ooxml-non-primitive" draw:enhanced-path="M 0 0 L 0 65590 131180 65590 131180 131180 N"><draw:equation draw:name="f0" draw:formula="logwidth"/><draw:equation draw:name="f1" draw:formula="logheight"/></draw:enhanced-geometry></draw:custom-shape><draw:custom-shape draw:name="Freeform: Shape 32" draw:style-name="gr29" draw:text-style-name="P210" svg:width="0.597cm" svg:height="3.005cm" svg:x="4.053cm" svg:y="4.212cm"><text:p/><draw:enhanced-geometry draw:mirror-horizontal="false" draw:mirror-vertical="false" drawooo:sub-view-size="120000 120000" draw:text-areas="0 0 ?f0 ?f1" svg:viewBox="0 0 0 0" draw:type="ooxml-non-primitive" draw:enhanced-path="M 0 0 L 0 131180 131180 131180 N"><draw:equation draw:name="f0" draw:formula="logwidth"/><draw:equation draw:name="f1" draw:formula="logheight"/></draw:enhanced-geometry></draw:custom-shape><draw:custom-shape draw:name="Freeform: Shape 33" draw:style-name="gr30" draw:text-style-name="P210" svg:width="0.597cm" svg:height="1.311cm" svg:x="4.053cm" svg:y="4.212cm"><text:p/><draw:enhanced-geometry draw:mirror-horizontal="false" draw:mirror-vertical="false" drawooo:sub-view-size="120000 120000" draw:text-areas="0 0 ?f0 ?f1" svg:viewBox="0 0 0 0" draw:type="ooxml-non-primitive" draw:enhanced-path="M 0 0 L 0 131180 131180 131180 N"><draw:equation draw:name="f0" draw:formula="logwidth"/><draw:equation draw:name="f1" draw:formula="logheight"/></draw:enhanced-geometry></draw:custom-shape><draw:custom-shape draw:name="Freeform: Shape 34" draw:style-name="gr31" draw:text-style-name="P210" svg:width="2.167cm" svg:height="0.927cm" svg:x="5.332cm" svg:y="2.503cm"><text:p/><draw:enhanced-geometry draw:mirror-horizontal="false" draw:mirror-vertical="false" drawooo:sub-view-size="120000 120000" draw:text-areas="0 0 ?f0 ?f1" svg:viewBox="0 0 0 0" draw:type="ooxml-non-primitive" draw:enhanced-path="M 131180 0 L 131180 65590 0 65590 0 131180 N"><draw:equation draw:name="f0" draw:formula="logwidth"/><draw:equation draw:name="f1" draw:formula="logheight"/></draw:enhanced-geometry></draw:custom-shape><draw:custom-shape draw:name="Freeform: Shape 35" draw:style-name="gr32" draw:text-style-name="P210" svg:width="0.255cm" svg:height="0.927cm" svg:x="7.373cm" svg:y="0.887cm"><text:p/><draw:enhanced-geometry draw:mirror-horizontal="false" draw:mirror-vertical="false" drawooo:sub-view-size="120000 120000" draw:text-areas="0 0 ?f0 ?f1" svg:viewBox="0 0 0 0" draw:type="ooxml-non-primitive" draw:enhanced-path="M 60000 0 L 60000 131180 N"><draw:equation draw:name="f0" draw:formula="logwidth"/><draw:equation draw:name="f1" draw:formula="logheight"/></draw:enhanced-geometry></draw:custom-shape><draw:custom-shape draw:name="Rectangle 36" draw:style-name="gr33" draw:text-style-name="P211" svg:width="5.301cm" svg:height="0.886cm" svg:x="4.849cm" svg:y="0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 draw:style-name="gr34" draw:text-style-name="P210" svg:width="5.301cm" svg:height="0.886cm" svg:x="4.849cm" svg:y="0cm"><text:p text:style-name="P196"><text:span text:style-name="T63">Junta Gener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 draw:style-name="gr35" draw:text-style-name="P211" svg:width="4.506cm" svg:height="0.685cm" svg:x="5.248cm" svg:y="1.817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gr36" draw:text-style-name="P210" svg:width="4.506cm" svg:height="0.685cm" svg:x="5.248cm" svg:y="1.817cm"><text:p text:style-name="P196"><text:span text:style-name="T63">Gerenc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 draw:style-name="gr37" draw:text-style-name="P211" svg:width="3.197cm" svg:height="0.779cm" svg:x="3.732cm" svg:y="3.433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 draw:style-name="gr38" draw:text-style-name="P210" svg:width="3.197cm" svg:height="0.779cm" svg:x="3.732cm" svg:y="3.433cm"><text:p text:style-name="P196"><text:span text:style-name="T63">Área de Produc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39" draw:text-style-name="P211" svg:width="1.673cm" svg:height="0.766cm" svg:x="4.651cm" svg:y="5.142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3" draw:style-name="gr40" draw:text-style-name="P210" svg:width="1.673cm" svg:height="0.766cm" svg:x="4.651cm" svg:y="5.142cm"><text:p text:style-name="P196"><text:span text:style-name="T63">Diseñ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41" draw:text-style-name="P211" svg:width="1.696cm" svg:height="0.763cm" svg:x="4.651cm" svg:y="6.837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5" draw:style-name="gr42" draw:text-style-name="P210" svg:width="1.696cm" svg:height="0.763cm" svg:x="4.651cm" svg:y="6.837cm"><text:p text:style-name="P196"><text:span text:style-name="T63">Estampa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 draw:style-name="gr43" draw:text-style-name="P211" svg:width="3.169cm" svg:height="0.826cm" svg:x="7.982cm" svg:y="3.433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7" draw:style-name="gr44" draw:text-style-name="P210" svg:width="3.169cm" svg:height="0.826cm" svg:x="7.982cm" svg:y="3.433cm"><text:p text:style-name="P196"><text:span text:style-name="T63">Área Comerc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8" draw:style-name="gr45" draw:text-style-name="P211" svg:width="1.823cm" svg:height="0.717cm" svg:x="8.774cm" svg:y="5.188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9" draw:style-name="gr46" draw:text-style-name="P210" svg:width="1.823cm" svg:height="0.717cm" svg:x="8.774cm" svg:y="5.188cm"><text:p text:style-name="P196"><text:span text:style-name="T63">Vent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 text:c="19"/></text:p>
      <text:p text:style-name="P125" loext:marker-style-name="T66"><text:span text:style-name="T66"><text:s text:c="2"/>Fuente: Elaboración Propia</text:span><text:span text:style-name="T66"/></text:p>
      <text:p text:style-name="P118" loext:marker-style-name="T52"><text:span text:style-name="T52">Procesos tercerizados</text:span><text:tab/></text:p>
      <text:p text:style-name="P126"><draw:g text:anchor-type="char" draw:z-index="18" draw:name="Group 1875474276" draw:style-name="gr1"><draw:g draw:style-name="gr2"><draw:custom-shape draw:name="Rectangle 51" draw:style-name="gr3" draw:text-style-name="P210" svg:width="9.245cm" svg:height="1.525cm" svg:x="0cm" svg:y="0.106cm"><text:p text:style-name="P1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rrow: Chevron 52" draw:style-name="gr4" draw:text-style-name="P211" svg:width="5.282cm" svg:height="1.525cm" svg:x="0cm" svg:y="0.106cm"><text:p text:style-name="P193"><text:span text:style-name="T61">Etiquetas para los polos</text:span></text:p><draw:enhanced-geometry draw:mirror-horizontal="false" draw:mirror-vertical="false" draw:text-areas="?f7 0 ?f8 ?f10" svg:viewBox="0 0 0 0" draw:type="ooxml-chevron" draw:modifiers="50000" draw:enhanced-path="M 0 0 L ?f4 0 ?f11 ?f9 ?f4 ?f10 0 ?f10 ?f3 ?f9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1/2"/><draw:equation draw:name="f6" draw:formula="?f4 +0-?f3 "/><draw:equation draw:name="f7" draw:formula="if(?f6 ,?f3 ,0)"/><draw:equation draw:name="f8" draw:formula="if(?f6 ,?f4 ,logwidth)"/><draw:equation draw:name="f9" draw:formula="logheight/2"/><draw:equation draw:name="f10" draw:formula="logheight"/><draw:equation draw:name="f11" draw:formula="logwidth"/><draw:handle draw:handle-position="?f4 0" draw:handle-range-x-maximum="?f1" draw:handle-range-x-minimum="0"/></draw:enhanced-geometry></draw:custom-shape><draw:custom-shape draw:name="Arrow: Chevron 53" draw:style-name="gr5" draw:text-style-name="P211" svg:width="4.1cm" svg:height="1.525cm" svg:x="5.145cm" svg:y="0.106cm"><text:p text:style-name="P193"><text:span text:style-name="T61">Empaque</text:span></text:p><draw:enhanced-geometry draw:mirror-horizontal="false" draw:mirror-vertical="false" draw:text-areas="?f7 0 ?f8 ?f10" svg:viewBox="0 0 0 0" draw:type="ooxml-chevron" draw:modifiers="50000" draw:enhanced-path="M 0 0 L ?f4 0 ?f11 ?f9 ?f4 ?f10 0 ?f10 ?f3 ?f9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1/2"/><draw:equation draw:name="f6" draw:formula="?f4 +0-?f3 "/><draw:equation draw:name="f7" draw:formula="if(?f6 ,?f3 ,0)"/><draw:equation draw:name="f8" draw:formula="if(?f6 ,?f4 ,logwidth)"/><draw:equation draw:name="f9" draw:formula="logheight/2"/><draw:equation draw:name="f10" draw:formula="logheight"/><draw:equation draw:name="f11" draw:formula="logwidth"/><draw:handle draw:handle-position="?f4 0" draw:handle-range-x-maximum="?f1" draw:handle-range-x-minimum="0"/></draw:enhanced-geometry></draw:custom-shape></draw:g></draw:g></text:p>
      <text:p text:style-name="P126"/>
      <text:p text:style-name="P126"/>
      <text:list xml:id="list32343609856298" text:continue-numbering="true" text:style-name="WWNum17">
        <text:list-item>
          <text:list>
            <text:list-item>
              <text:list>
                <text:list-item>
                  <text:h text:style-name="P86" text:outline-level="3"><text:bookmark text:name="_heading=h.34g0dwd"/><text:bookmark-start text:name="_Toc106699170"/>Perfil de puestos y funciones<text:bookmark-end text:name="_Toc106699170"/></text:h>
                </text:list-item>
              </text:list>
            </text:list-item>
          </text:list>
        </text:list-item>
      </text:list>
      <text:p text:style-name="P116" loext:marker-style-name="T35"><text:span text:style-name="T35">El perfil y sus principales funciones para cada puesto se describen en las siguientes tablas:</text:span><text:span text:style-name="T35"/></text:p>
      <text:p text:style-name="P118" loext:marker-style-name="T49"><text:span text:style-name="T49">Tabla 4-1 </text:span><text:span text:style-name="T49"/></text:p>
      <text:p text:style-name="P118" loext:marker-style-name="T49"><text:span text:style-name="T49">Perfil y sus principales funciones del Gerente General</text:span><text:span text:style-name="T49"/></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97" loext:marker-style-name="T36"><text:span text:style-name="T39">Descripción del puesto</text:span><text:span text:style-name="T36">:</text:span></text:p>
          </table:table-cell>
          <table:table-cell table:style-name="Tabla27.B1" table:number-columns-spanned="2" office:value-type="string">
            <text:p text:style-name="P197" loext:marker-style-name="T36"><text:span text:style-name="T36">Gerente general</text:span><text:span text:style-name="T36"/></text:p>
          </table:table-cell>
          <table:covered-table-cell/>
        </table:table-row>
        <table:table-row table:style-name="Tabla27.2">
          <table:table-cell table:style-name="Tabla27.A1" office:value-type="string">
            <text:p text:style-name="P197" loext:marker-style-name="T36"><text:span text:style-name="T36">Reporta a:</text:span><text:span text:style-name="T36"/></text:p>
          </table:table-cell>
          <table:table-cell table:style-name="Tabla27.B2" table:number-columns-spanned="2" office:value-type="string">
            <text:p text:style-name="P197" loext:marker-style-name="T36"><text:span text:style-name="T36">Socios del negocio</text:span><text:span text:style-name="T36"/></text:p>
          </table:table-cell>
          <table:covered-table-cell/>
        </table:table-row>
        <table:table-row table:style-name="Tabla27.1">
          <table:table-cell table:style-name="Tabla27.A1" office:value-type="string">
            <text:p text:style-name="P197" loext:marker-style-name="T36"><text:span text:style-name="T36">Le reportan:</text:span><text:span text:style-name="T36"/></text:p>
          </table:table-cell>
          <table:table-cell table:style-name="Tabla27.B3" table:number-columns-spanned="2" office:value-type="string">
            <text:p text:style-name="P197" loext:marker-style-name="T36"><text:span text:style-name="T36">Personal de las áreas de producción y comercial.</text:span><text:span text:style-name="T36"/></text:p>
          </table:table-cell>
          <table:covered-table-cell/>
        </table:table-row>
        <table:table-row table:style-name="Tabla27.2">
          <table:table-cell table:style-name="Tabla27.A1" office:value-type="string">
            <text:p text:style-name="P197" loext:marker-style-name="T36"><text:span text:style-name="T36">Coordina con:</text:span><text:span text:style-name="T36"/></text:p>
          </table:table-cell>
          <table:table-cell table:style-name="Tabla27.B4" table:number-columns-spanned="2" office:value-type="string">
            <text:p text:style-name="P197" loext:marker-style-name="T36"><text:span text:style-name="T36">Personal de las áreas de producción y comercial.</text:span><text:span text:style-name="T36"/></text:p>
          </table:table-cell>
          <table:covered-table-cell/>
        </table:table-row>
        <table:table-row table:style-name="Tabla27.5">
          <table:table-cell table:style-name="Tabla27.A1" table:number-columns-spanned="2" office:value-type="string">
            <text:p text:style-name="P197" loext:marker-style-name="T36"><text:span text:style-name="T36">Perfil del puesto:</text:span><text:span text:style-name="T36"/></text:p>
          </table:table-cell>
          <table:covered-table-cell/>
          <table:table-cell table:style-name="Tabla27.A1" office:value-type="string">
            <text:p text:style-name="P197" loext:marker-style-name="T36"><text:span text:style-name="T36">Competencias Requeridas:</text:span><text:span text:style-name="T36"/></text:p>
          </table:table-cell>
        </table:table-row>
        <table:table-row table:style-name="Tabla27.6">
          <table:table-cell table:style-name="Tabla27.A6" table:number-columns-spanned="2" office:value-type="string">
            <text:p text:style-name="P197" loext:marker-style-name="T36"><text:span text:style-name="T36">Título en administración o afines</text:span><text:span text:style-name="T36"/></text:p>
            <text:p text:style-name="P197" loext:marker-style-name="T36"><text:span text:style-name="T36">Conocimiento en computación</text:span><text:span text:style-name="T36"/></text:p>
          </table:table-cell>
          <table:covered-table-cell/>
          <table:table-cell table:style-name="Tabla27.C6" office:value-type="string">
            <text:p text:style-name="P197" loext:marker-style-name="T36"><text:span text:style-name="T36">Facilidad de comunicación</text:span><text:span text:style-name="T36"/></text:p>
            <text:p text:style-name="P197" loext:marker-style-name="T36"><text:span text:style-name="T36">Liderazgo</text:span><text:span text:style-name="T36"/></text:p>
            <text:p text:style-name="P197" loext:marker-style-name="T36"><text:span text:style-name="T36">Empatía</text:span><text:span text:style-name="T36"/></text:p>
            <text:p text:style-name="P197" loext:marker-style-name="T36"><text:span text:style-name="T36">Capacidad de trabajar en equipo</text:span><text:span text:style-name="T36"/></text:p>
          </table:table-cell>
        </table:table-row>
        <table:table-row table:style-name="Tabla27.1">
          <table:table-cell table:style-name="Tabla27.A1" table:number-columns-spanned="3" office:value-type="string">
            <text:p text:style-name="P197" loext:marker-style-name="T36"><text:span text:style-name="T36">Funciones principales</text:span><text:span text:style-name="T36"/></text:p>
          </table:table-cell>
          <table:covered-table-cell/>
          <table:covered-table-cell/>
        </table:table-row>
        <table:table-row table:style-name="Tabla27.8">
          <table:table-cell table:style-name="Tabla27.A8" table:number-columns-spanned="3" office:value-type="string">
            <text:list text:style-name="WWNum20">
              <text:list-item>
                <text:p text:style-name="P194" loext:marker-style-name="T36"><text:span text:style-name="T36">Planificar las actividades para el logro de los objetivos y de los planes de la organización. Organizar el rendimiento del personal de la empresa. </text:span><text:span text:style-name="T36"/></text:p>
              </text:list-item>
              <text:list-item>
                <text:p text:style-name="P194" loext:marker-style-name="T36"><text:span text:style-name="T36">Seleccionar al personal idóneo para le empresa, asimismo selecciona a los proveedores que tendrá la empresa. </text:span><text:span text:style-name="T36"/></text:p>
              </text:list-item>
              <text:list-item>
                <text:p text:style-name="P194" loext:marker-style-name="T36"><text:span text:style-name="T36">Elegir a los mejores proveedores de bienes para cumplir con los entandares de calidad del negocio.</text:span><text:span text:style-name="T36"/></text:p>
              </text:list-item>
            </text:list>
          </table:table-cell>
          <table:covered-table-cell/>
          <table:covered-table-cell/>
        </table:table-row>
      </table:table>
      <text:p text:style-name="P118" loext:marker-style-name="T67"><text:span text:style-name="T67">Elaboración: Propia</text:span><text:span text:style-name="T67"/></text:p>
      <text:p text:style-name="P120" loext:marker-style-name="T49"><text:span text:style-name="T49">Tabla 4-2 </text:span><text:span text:style-name="T49"/></text:p>
      <text:p text:style-name="P120" loext:marker-style-name="T49"><text:span text:style-name="T49">Perfil y sus principales funciones del Diseñador Gráfico.</text:span><text:span text:style-name="T49"/></text:p>
      <table:table table:name="Tabla28" table:style-name="Tabla28">
        <table:table-column table:style-name="Tabla28.A"/>
        <table:table-column table:style-name="Tabla28.B"/>
        <table:table-column table:style-name="Tabla28.C"/>
        <text:soft-page-break/>
        <table:table-row table:style-name="Tabla28.1">
          <table:table-cell table:style-name="Tabla28.A1" office:value-type="string">
            <text:p text:style-name="P197" loext:marker-style-name="T36"><text:span text:style-name="T36">Descripción del puesto:</text:span><text:span text:style-name="T36"/></text:p>
          </table:table-cell>
          <table:table-cell table:style-name="Tabla28.B1" table:number-columns-spanned="2" office:value-type="string">
            <text:p text:style-name="P197" loext:marker-style-name="T36"><text:span text:style-name="T36">Diseñador gráfico</text:span><text:span text:style-name="T36"/></text:p>
          </table:table-cell>
          <table:covered-table-cell/>
        </table:table-row>
        <table:table-row table:style-name="Tabla28.2">
          <table:table-cell table:style-name="Tabla28.A1" office:value-type="string">
            <text:p text:style-name="P197" loext:marker-style-name="T36"><text:span text:style-name="T36">Reporta a:</text:span><text:span text:style-name="T36"/></text:p>
          </table:table-cell>
          <table:table-cell table:style-name="Tabla28.B2" table:number-columns-spanned="2" office:value-type="string">
            <text:p text:style-name="P197" loext:marker-style-name="T36"><text:span text:style-name="T36">Gerente</text:span><text:span text:style-name="T36"/></text:p>
          </table:table-cell>
          <table:covered-table-cell/>
        </table:table-row>
        <table:table-row table:style-name="Tabla28.1">
          <table:table-cell table:style-name="Tabla28.A1" office:value-type="string">
            <text:p text:style-name="P197" loext:marker-style-name="T36"><text:span text:style-name="T36">Coordina con:</text:span><text:span text:style-name="T36"/></text:p>
          </table:table-cell>
          <table:table-cell table:style-name="Tabla28.B3" table:number-columns-spanned="2" office:value-type="string">
            <text:p text:style-name="P197" loext:marker-style-name="T36"><text:span text:style-name="T36">Gerente y personal de estampado.</text:span><text:span text:style-name="T36"/></text:p>
          </table:table-cell>
          <table:covered-table-cell/>
        </table:table-row>
        <table:table-row table:style-name="Tabla28.4">
          <table:table-cell table:style-name="Tabla28.A1" table:number-columns-spanned="2" office:value-type="string">
            <text:p text:style-name="P197" loext:marker-style-name="T36"><text:span text:style-name="T36">Perfil del puesto:</text:span><text:span text:style-name="T36"/></text:p>
          </table:table-cell>
          <table:covered-table-cell/>
          <table:table-cell table:style-name="Tabla28.A1" office:value-type="string">
            <text:p text:style-name="P197" loext:marker-style-name="T36"><text:span text:style-name="T36">Competencias Requeridas:</text:span><text:span text:style-name="T36"/></text:p>
          </table:table-cell>
        </table:table-row>
        <table:table-row table:style-name="Tabla28.5">
          <table:table-cell table:style-name="Tabla28.A5" table:number-columns-spanned="2" office:value-type="string">
            <text:p text:style-name="P197" loext:marker-style-name="T36"><text:span text:style-name="T36">Técnico en diseño gráfico </text:span><text:span text:style-name="T36"/></text:p>
            <text:p text:style-name="P197" loext:marker-style-name="T36"><text:span text:style-name="T36">Estudiante de diseño gráfico del último año de carrera.</text:span><text:span text:style-name="T36"/></text:p>
            <text:p text:style-name="P197" loext:marker-style-name="T36"><text:span text:style-name="T36">Conocimiento avanzado de los programas de diseño como Photoshop, Corel Draw, etc.</text:span><text:span text:style-name="T36"/></text:p>
          </table:table-cell>
          <table:covered-table-cell/>
          <table:table-cell table:style-name="Tabla28.C5" office:value-type="string">
            <text:p text:style-name="P197" loext:marker-style-name="T36"><text:span text:style-name="T36">Facilidad de comunicación</text:span><text:span text:style-name="T36"/></text:p>
            <text:p text:style-name="P197" loext:marker-style-name="T36"><text:span text:style-name="T36">Creatividad</text:span><text:span text:style-name="T36"/></text:p>
            <text:p text:style-name="P197" loext:marker-style-name="T36"><text:span text:style-name="T36">Empatía</text:span><text:span text:style-name="T36"/></text:p>
            <text:p text:style-name="P197" loext:marker-style-name="T36"><text:span text:style-name="T36">Capacidad de trabajar en equipo</text:span><text:span text:style-name="T36"/></text:p>
          </table:table-cell>
        </table:table-row>
        <table:table-row table:style-name="Tabla28.2">
          <table:table-cell table:style-name="Tabla28.A1" table:number-columns-spanned="3" office:value-type="string">
            <text:p text:style-name="P197" loext:marker-style-name="T36"><text:span text:style-name="T36">Funciones principales</text:span><text:span text:style-name="T36"/></text:p>
          </table:table-cell>
          <table:covered-table-cell/>
          <table:covered-table-cell/>
        </table:table-row>
        <table:table-row table:style-name="Tabla28.7">
          <table:table-cell table:style-name="Tabla28.A7" table:number-columns-spanned="3" office:value-type="string">
            <text:list text:continue-numbering="true" text:style-name="WWNum20">
              <text:list-item>
                <text:p text:style-name="P194" loext:marker-style-name="T36"><text:span text:style-name="T36">Diseñar propios, innovadores y creativos diseño.</text:span><text:span text:style-name="T36"/></text:p>
              </text:list-item>
              <text:list-item>
                <text:p text:style-name="P194" loext:marker-style-name="T36"><text:span text:style-name="T36">Mejorar los diseños del cliente.</text:span><text:span text:style-name="T36"/></text:p>
              </text:list-item>
            </text:list>
          </table:table-cell>
          <table:covered-table-cell/>
          <table:covered-table-cell/>
        </table:table-row>
      </table:table>
      <text:p text:style-name="P120" loext:marker-style-name="T67"><text:span text:style-name="T67">Elaboración: Propia</text:span><text:span text:style-name="T67"/></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97" loext:marker-style-name="T36"><text:span text:style-name="T36">Descripción del puesto:</text:span><text:span text:style-name="T36"/></text:p>
          </table:table-cell>
          <table:table-cell table:style-name="Tabla29.B1" table:number-columns-spanned="2" office:value-type="string">
            <text:p text:style-name="P197" loext:marker-style-name="T36"><text:span text:style-name="T36">Personal de estampado</text:span><text:span text:style-name="T36"/></text:p>
          </table:table-cell>
          <table:covered-table-cell/>
        </table:table-row>
        <table:table-row table:style-name="Tabla29.2">
          <table:table-cell table:style-name="Tabla29.A1" office:value-type="string">
            <text:p text:style-name="P197" loext:marker-style-name="T36"><text:span text:style-name="T36">Reporta a:</text:span><text:span text:style-name="T36"/></text:p>
          </table:table-cell>
          <table:table-cell table:style-name="Tabla29.B2" table:number-columns-spanned="2" office:value-type="string">
            <text:p text:style-name="P197" loext:marker-style-name="T36"><text:span text:style-name="T36">Gerente</text:span><text:span text:style-name="T36"/></text:p>
          </table:table-cell>
          <table:covered-table-cell/>
        </table:table-row>
        <table:table-row table:style-name="Tabla29.3">
          <table:table-cell table:style-name="Tabla29.A1" office:value-type="string">
            <text:p text:style-name="P197" loext:marker-style-name="T36"><text:span text:style-name="T36">Coordina con:</text:span><text:span text:style-name="T36"/></text:p>
          </table:table-cell>
          <table:table-cell table:style-name="Tabla29.B3" table:number-columns-spanned="2" office:value-type="string">
            <text:p text:style-name="P197" loext:marker-style-name="T36"><text:span text:style-name="T36">Gerente, diseñador gráfico</text:span><text:span text:style-name="T36"/></text:p>
          </table:table-cell>
          <table:covered-table-cell/>
        </table:table-row>
        <table:table-row table:style-name="Tabla29.4">
          <table:table-cell table:style-name="Tabla29.A1" table:number-columns-spanned="2" office:value-type="string">
            <text:p text:style-name="P197" loext:marker-style-name="T36"><text:span text:style-name="T36">Perfil del puesto:</text:span><text:span text:style-name="T36"/></text:p>
          </table:table-cell>
          <table:covered-table-cell/>
          <table:table-cell table:style-name="Tabla29.A1" office:value-type="string">
            <text:p text:style-name="P197" loext:marker-style-name="T36"><text:span text:style-name="T36">Competencias Requeridas:</text:span><text:span text:style-name="T36"/></text:p>
          </table:table-cell>
        </table:table-row>
        <table:table-row table:style-name="Tabla29.5">
          <table:table-cell table:style-name="Tabla29.A5" table:number-columns-spanned="2" office:value-type="string">
            <text:p text:style-name="P197" loext:marker-style-name="T36"><text:span text:style-name="T36">Conocimientos previos en estampados de polos.</text:span><text:span text:style-name="T36"/></text:p>
          </table:table-cell>
          <table:covered-table-cell/>
          <table:table-cell table:style-name="Tabla29.C5" office:value-type="string">
            <text:p text:style-name="P197" loext:marker-style-name="T36"><text:span text:style-name="T36">Facilidad de comunicación</text:span><text:span text:style-name="T36"/></text:p>
            <text:p text:style-name="P197" loext:marker-style-name="T36"><text:span text:style-name="T36">Capacidad de trabajar en equipo</text:span><text:span text:style-name="T36"/></text:p>
            <text:p text:style-name="P197" loext:marker-style-name="T36"><text:span text:style-name="T36">Capacidad de trabajar bajo presión</text:span><text:span text:style-name="T36"/></text:p>
          </table:table-cell>
        </table:table-row>
        <table:table-row table:style-name="Tabla29.6">
          <table:table-cell table:style-name="Tabla29.A1" table:number-columns-spanned="3" office:value-type="string">
            <text:p text:style-name="P197" loext:marker-style-name="T36"><text:span text:style-name="T36">Funciones principales</text:span><text:span text:style-name="T36"/></text:p>
          </table:table-cell>
          <table:covered-table-cell/>
          <table:covered-table-cell/>
        </table:table-row>
        <table:table-row table:style-name="Tabla29.7">
          <table:table-cell table:style-name="Tabla29.A7" table:number-columns-spanned="3" office:value-type="string">
            <text:list text:continue-numbering="true" text:style-name="WWNum20">
              <text:list-item>
                <text:p text:style-name="P194" loext:marker-style-name="T36"><text:span text:style-name="T36">Plasmar diseños tanto de la tienda, cómo diseños de los clientes.</text:span><text:span text:style-name="T36"/></text:p>
              </text:list-item>
              <text:list-item>
                <text:p text:style-name="P194" loext:marker-style-name="T36"><text:span text:style-name="T36">Etiquetado de los polos y empaquetado de los polos.</text:span><text:span text:style-name="T36"/></text:p>
              </text:list-item>
            </text:list>
          </table:table-cell>
          <table:covered-table-cell/>
          <table:covered-table-cell/>
        </table:table-row>
      </table:table>
      <text:p text:style-name="P120" loext:marker-style-name="T49"><text:span text:style-name="T49">Tabla 4-3 Perfil y sus principales funciones del </text:span><text:span text:style-name="T40">Personal de estampado</text:span></text:p>
      <text:p text:style-name="P120" loext:marker-style-name="T67"><text:span text:style-name="T67">Elaboración: Propia</text:span><text:span text:style-name="T67"/></text:p>
      <text:p text:style-name="P120" loext:marker-style-name="T49"><text:span text:style-name="T49">Tabla 4-4 </text:span><text:span text:style-name="T49"/></text:p>
      <text:p text:style-name="P120" loext:marker-style-name="T49"><text:span text:style-name="T49">Perfil y sus principales funciones del </text:span><text:span text:style-name="T40">Personal de ventas</text:span></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197" loext:marker-style-name="T36"><text:span text:style-name="T36">Descripción del puesto:</text:span><text:span text:style-name="T36"/></text:p>
          </table:table-cell>
          <table:table-cell table:style-name="Tabla30.B1" table:number-columns-spanned="2" office:value-type="string">
            <text:p text:style-name="P197" loext:marker-style-name="T36"><text:span text:style-name="T36">Personal de ventas</text:span><text:span text:style-name="T36"/></text:p>
          </table:table-cell>
          <table:covered-table-cell/>
        </table:table-row>
        <table:table-row table:style-name="Tabla30.1">
          <table:table-cell table:style-name="Tabla30.A1" office:value-type="string">
            <text:p text:style-name="P197" loext:marker-style-name="T36"><text:span text:style-name="T36">Reporta a:</text:span><text:span text:style-name="T36"/></text:p>
          </table:table-cell>
          <table:table-cell table:style-name="Tabla30.B2" table:number-columns-spanned="2" office:value-type="string">
            <text:p text:style-name="P197" loext:marker-style-name="T36"><text:span text:style-name="T36">Gerente</text:span><text:span text:style-name="T36"/></text:p>
          </table:table-cell>
          <table:covered-table-cell/>
        </table:table-row>
        <table:table-row table:style-name="Tabla30.1">
          <table:table-cell table:style-name="Tabla30.A1" office:value-type="string">
            <text:p text:style-name="P197" loext:marker-style-name="T36"><text:span text:style-name="T36">Coordina con:</text:span><text:span text:style-name="T36"/></text:p>
          </table:table-cell>
          <table:table-cell table:style-name="Tabla30.B3" table:number-columns-spanned="2" office:value-type="string">
            <text:p text:style-name="P197" loext:marker-style-name="T36"><text:span text:style-name="T36">Gerente, personal de estampado.</text:span><text:span text:style-name="T36"/></text:p>
          </table:table-cell>
          <table:covered-table-cell/>
        </table:table-row>
        <table:table-row table:style-name="Tabla30.4">
          <table:table-cell table:style-name="Tabla30.A1" table:number-columns-spanned="2" office:value-type="string">
            <text:p text:style-name="P197" loext:marker-style-name="T36"><text:span text:style-name="T36">Perfil del puesto:</text:span><text:span text:style-name="T36"/></text:p>
          </table:table-cell>
          <table:covered-table-cell/>
          <table:table-cell table:style-name="Tabla30.A1" office:value-type="string">
            <text:p text:style-name="P197" loext:marker-style-name="T36"><text:span text:style-name="T36">Competencias Requeridas:</text:span><text:span text:style-name="T36"/></text:p>
          </table:table-cell>
        </table:table-row>
        <table:table-row table:style-name="Tabla30.5">
          <table:table-cell table:style-name="Tabla30.A5" table:number-columns-spanned="2" office:value-type="string">
            <text:p text:style-name="P197" loext:marker-style-name="T36"><text:span text:style-name="T36">Persona proactiva</text:span><text:span text:style-name="T36"/></text:p>
          </table:table-cell>
          <table:covered-table-cell/>
          <table:table-cell table:style-name="Tabla30.C5" office:value-type="string">
            <text:p text:style-name="P197" loext:marker-style-name="T36"><text:span text:style-name="T36">Facilidad de comunicación</text:span><text:span text:style-name="T36"/></text:p>
            <text:p text:style-name="P197" loext:marker-style-name="T36"><text:span text:style-name="T36">Empatía</text:span><text:span text:style-name="T36"/></text:p>
            <text:p text:style-name="P197" loext:marker-style-name="T36"><text:span text:style-name="T36">Capacidad de trabajar en equipo</text:span><text:span text:style-name="T36"/></text:p>
            <text:p text:style-name="P172" loext:marker-style-name="T36"/>
          </table:table-cell>
        </table:table-row>
        <table:table-row table:style-name="Tabla30.1">
          <table:table-cell table:style-name="Tabla30.A1" table:number-columns-spanned="3" office:value-type="string">
            <text:p text:style-name="P197" loext:marker-style-name="T36"><text:span text:style-name="T36">Funciones principales</text:span><text:span text:style-name="T36"/></text:p>
          </table:table-cell>
          <table:covered-table-cell/>
          <table:covered-table-cell/>
        </table:table-row>
        <table:table-row table:style-name="Tabla30.1">
          <table:table-cell table:style-name="Tabla30.A7" table:number-columns-spanned="3" office:value-type="string">
            <text:list text:style-name="WWNum21">
              <text:list-item>
                <text:p text:style-name="P195" loext:marker-style-name="T36"><text:span text:style-name="T36">Captar clientes y hacerlos conocedores de nuestro negocio.</text:span><text:span text:style-name="T36"/></text:p>
              </text:list-item>
              <text:list-item>
                <text:p text:style-name="P195" loext:marker-style-name="T36"><text:span text:style-name="T36">Atención directa con el cliente.</text:span><text:span text:style-name="T36"/></text:p>
              </text:list-item>
              <text:list-item>
                <text:p text:style-name="P195" loext:marker-style-name="T36"><text:span text:style-name="T36">Coordinar con los proveedores de tintas pigmentadas y papel transfer.</text:span><text:span text:style-name="T36"/></text:p>
              </text:list-item>
              <text:list-item>
                <text:p text:style-name="P195" loext:marker-style-name="T36"><text:span text:style-name="T36">Promocionar los diseños a través de redes sociales y páginas web. Ejecutar campañas de promoción y publicidad de los productos de la empresa.</text:span><text:span text:style-name="T36"/></text:p>
              </text:list-item>
            </text:list>
          </table:table-cell>
          <table:covered-table-cell/>
          <table:covered-table-cell/>
        </table:table-row>
      </table:table>
      <text:p text:style-name="P120" loext:marker-style-name="T67"><text:span text:style-name="T67">Elaboración. Propia</text:span><text:span text:style-name="T67"/></text:p>
      <text:list text:continue-list="list32343609856298" text:style-name="WWNum17">
        <text:list-item>
          <text:list>
            <text:list-item>
              <text:list>
                <text:list-item>
                  <text:h text:style-name="P86" text:outline-level="3"><text:bookmark text:name="_heading=h.1jlao46"/><text:bookmark-start text:name="_Toc106699171"/>Captación de personal<text:bookmark-end text:name="_Toc106699171"/></text:h>
                </text:list-item>
              </text:list>
            </text:list-item>
          </text:list>
        </text:list-item>
      </text:list>
      <text:p text:style-name="P116" loext:marker-style-name="T35"><text:span text:style-name="T35">Paso 1 “Solicitud de empleo” </text:span><text:span text:style-name="T35"/></text:p>
      <text:p text:style-name="P116" loext:marker-style-name="T35"><text:span text:style-name="T35">Paso 2 “Entrevista” </text:span><text:span text:style-name="T35"/></text:p>
      <text:p text:style-name="P116" loext:marker-style-name="T35"><text:span text:style-name="T35">Paso 3 “Exámenes”</text:span><text:span text:style-name="T35"/></text:p>
      <text:p text:style-name="P116" loext:marker-style-name="T35"><text:span text:style-name="T35">Paso 4 “Investigación a candidatos” </text:span><text:span text:style-name="T35"/></text:p>
      <text:p text:style-name="P116" loext:marker-style-name="T35"><text:span text:style-name="T35">Paso 5 “Contratación”</text:span><text:span text:style-name="T35"/></text:p>
      <text:p text:style-name="P116" loext:marker-style-name="T54"><text:span text:style-name="T35">Paso 6 “Inducción</text:span><text:span text:style-name="T54">”</text:span><text:span text:style-name="T35"> </text:span></text:p>
      <text:list text:continue-numbering="true" text:style-name="WWNum17">
        <text:list-item>
          <text:list>
            <text:list-item>
              <text:list>
                <text:list-item>
                  <text:h text:style-name="P86" text:outline-level="3"><text:bookmark text:name="_heading=h.43ky6rz"/><text:bookmark-start text:name="_Toc106699172"/>Desarrollo de personal<text:bookmark-end text:name="_Toc106699172"/></text:h>
                </text:list-item>
              </text:list>
            </text:list-item>
          </text:list>
        </text:list-item>
      </text:list>
      <text:p text:style-name="P116" loext:marker-style-name="T54"><text:span text:style-name="T54">Adiestramiento: </text:span><text:span text:style-name="T54"/></text:p>
      <text:p text:style-name="P116" loext:marker-style-name="T35"><text:soft-page-break/><text:span text:style-name="T35">El personal a quienes va dirigido el adiestramiento interno, por parte de los socios de la empresa, serán el personal de ventas y gerente.</text:span><text:span text:style-name="T35"/></text:p>
      <text:p text:style-name="P116" loext:marker-style-name="T35"><text:span text:style-name="T35">El personal encargado de realizar los estampados será capacitado por la empresa proveedora de los equipos “Sublimake Perú” por medio de vídeos, para que de esa manera se conozca el manejo y cuidado técnico.</text:span><text:span text:style-name="T35"/></text:p>
      <text:p text:style-name="P116" loext:marker-style-name="T54"><text:span text:style-name="T54">Capacitación:</text:span><text:span text:style-name="T54"/></text:p>
      <text:p text:style-name="P116" loext:marker-style-name="T35"><text:span text:style-name="T35"><text:s/>El personal de diseños será capacitado. Tanto el personal de diseños será capacitado de manera virtual por medio del dictado de un curso por la empresa “Ox”, cuyo costo es de 60 soles.</text:span><text:span text:style-name="T35"/></text:p>
      <text:list text:continue-numbering="true" text:style-name="WWNum17">
        <text:list-item>
          <text:list>
            <text:list-item>
              <text:list>
                <text:list-item>
                  <text:h text:style-name="P86" text:outline-level="3"><text:bookmark text:name="_heading=h.2iq8gzs"/><text:bookmark-start text:name="_Toc106699173"/>Administración de sueldos y salarios<text:bookmark-end text:name="_Toc106699173"/></text:h>
                </text:list-item>
              </text:list>
            </text:list-item>
          </text:list>
        </text:list-item>
      </text:list>
      <text:p text:style-name="P116" loext:marker-style-name="T35"><text:span text:style-name="T35">La tienda StampAdek contara con 5 colaboradores compuesto por 1 gerente general, 1 contador, 1 diseñador, 1 personal de venta, 1 estampador (debe saber manejar los equipos) los cuales estarán en planilla. Por lo cual, le corresponderá el pago de SIS, pago de vacaciones por 15 días. Se le pagara un sueldo de manera mensual. </text:span><text:span text:style-name="T35"/></text:p>
      <text:p text:style-name="P120" loext:marker-style-name="T49"><text:span text:style-name="T49">Tabla 4-5 </text:span><text:span text:style-name="T49"/></text:p>
      <text:p text:style-name="P120" loext:marker-style-name="T49"><text:span text:style-name="T49">Estructura De Gastos De RRHH</text:span><text:span text:style-name="T49"/></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row table:style-name="Tabla31.1">
          <table:table-cell table:style-name="Tabla31.A1" office:value-type="string">
            <text:p text:style-name="P198" loext:marker-style-name="T36"><text:span text:style-name="T36">Nombre Puesto</text:span><text:span text:style-name="T36"/></text:p>
          </table:table-cell>
          <table:table-cell table:style-name="Tabla31.A1" office:value-type="string">
            <text:p text:style-name="P198" loext:marker-style-name="T36"><text:span text:style-name="T36">N° de personas</text:span><text:span text:style-name="T36"/></text:p>
          </table:table-cell>
          <table:table-cell table:style-name="Tabla31.A1" office:value-type="string">
            <text:p text:style-name="P198" loext:marker-style-name="T36"><text:span text:style-name="T36">Sueldo<text:line-break/>Mensual por persona</text:span><text:span text:style-name="T36"/></text:p>
          </table:table-cell>
          <table:table-cell table:style-name="Tabla31.A1" office:value-type="string">
            <text:p text:style-name="P198" loext:marker-style-name="T36"><text:span text:style-name="T36">Total</text:span><text:span text:style-name="T36"/></text:p>
          </table:table-cell>
          <table:table-cell table:style-name="Tabla31.A1" office:value-type="string">
            <text:p text:style-name="P198" loext:marker-style-name="T36"><text:span text:style-name="T36">Sueldo<text:line-break/>Mensual<text:line-break/>Total</text:span><text:span text:style-name="T36"/></text:p>
          </table:table-cell>
          <table:table-cell table:style-name="Tabla31.A1" office:value-type="string">
            <text:p text:style-name="P198" loext:marker-style-name="T36"><text:span text:style-name="T36">SIS</text:span><text:span text:style-name="T36"/></text:p>
          </table:table-cell>
          <table:table-cell table:style-name="Tabla31.A1" office:value-type="string">
            <text:p text:style-name="P198" loext:marker-style-name="T36"><text:span text:style-name="T36">Total, Anual</text:span><text:span text:style-name="T36"/></text:p>
          </table:table-cell>
        </table:table-row>
        <table:table-row table:style-name="Tabla31.2">
          <table:table-cell table:style-name="Tabla31.A1" office:value-type="string">
            <text:p text:style-name="P198" loext:marker-style-name="T36"><text:span text:style-name="T36">Gerencia</text:span><text:span text:style-name="T36"/></text:p>
          </table:table-cell>
          <table:table-cell table:style-name="Tabla31.A1" office:value-type="string">
            <text:p text:style-name="P199" loext:marker-style-name="T36"><text:span text:style-name="T36">1</text:span><text:span text:style-name="T36"/></text:p>
          </table:table-cell>
          <table:table-cell table:style-name="Tabla31.A1" office:value-type="string">
            <text:p text:style-name="P199" loext:marker-style-name="T37"><text:span text:style-name="T37">1200</text:span><text:span text:style-name="T37"/></text:p>
          </table:table-cell>
          <table:table-cell table:style-name="Tabla31.A1" office:value-type="string">
            <text:p text:style-name="P199" loext:marker-style-name="T36"><text:span text:style-name="T36">1200</text:span><text:span text:style-name="T36"/></text:p>
          </table:table-cell>
          <table:table-cell table:style-name="Tabla31.A1" office:value-type="string">
            <text:p text:style-name="P199" loext:marker-style-name="T36"><text:span text:style-name="T36">1200</text:span><text:span text:style-name="T36"/></text:p>
          </table:table-cell>
          <table:table-cell table:style-name="Tabla31.A1" office:value-type="string">
            <text:p text:style-name="P173" loext:marker-style-name="T36"/>
          </table:table-cell>
          <table:table-cell table:style-name="Tabla31.A1" office:value-type="string">
            <text:p text:style-name="P199" loext:marker-style-name="T36"><text:span text:style-name="T36">14400</text:span><text:span text:style-name="T36"/></text:p>
          </table:table-cell>
        </table:table-row>
        <table:table-row table:style-name="Tabla31.2">
          <table:table-cell table:style-name="Tabla31.A1" office:value-type="string">
            <text:p text:style-name="P198" loext:marker-style-name="T36"><text:span text:style-name="T36">Contabilidad</text:span><text:span text:style-name="T36"/></text:p>
          </table:table-cell>
          <table:table-cell table:style-name="Tabla31.A1" office:value-type="string">
            <text:p text:style-name="P199" loext:marker-style-name="T36"><text:span text:style-name="T36">1</text:span><text:span text:style-name="T36"/></text:p>
          </table:table-cell>
          <table:table-cell table:style-name="Tabla31.A1" office:value-type="string">
            <text:p text:style-name="P199" loext:marker-style-name="T37"><text:span text:style-name="T37">930</text:span><text:span text:style-name="T37"/></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74" loext:marker-style-name="T36"/>
          </table:table-cell>
          <table:table-cell table:style-name="Tabla31.A1" office:value-type="string">
            <text:p text:style-name="P199" loext:marker-style-name="T36"><text:span text:style-name="T36">11160</text:span><text:span text:style-name="T36"/></text:p>
          </table:table-cell>
        </table:table-row>
        <table:table-row table:style-name="Tabla31.2">
          <table:table-cell table:style-name="Tabla31.A1" office:value-type="string">
            <text:p text:style-name="P198" loext:marker-style-name="T36"><text:span text:style-name="T36">Diseñador</text:span><text:span text:style-name="T36"/></text:p>
          </table:table-cell>
          <table:table-cell table:style-name="Tabla31.A1" office:value-type="string">
            <text:p text:style-name="P199" loext:marker-style-name="T36"><text:span text:style-name="T36">1</text:span><text:span text:style-name="T36"/></text:p>
          </table:table-cell>
          <table:table-cell table:style-name="Tabla31.A1" office:value-type="string">
            <text:p text:style-name="P199" loext:marker-style-name="T37"><text:span text:style-name="T37">1185</text:span><text:span text:style-name="T37"/></text:p>
          </table:table-cell>
          <table:table-cell table:style-name="Tabla31.A1" office:value-type="string">
            <text:p text:style-name="P199" loext:marker-style-name="T36"><text:span text:style-name="T36">1185</text:span><text:span text:style-name="T36"/></text:p>
          </table:table-cell>
          <table:table-cell table:style-name="Tabla31.A1" office:value-type="string">
            <text:p text:style-name="P199" loext:marker-style-name="T36"><text:span text:style-name="T36">1185</text:span><text:span text:style-name="T36"/></text:p>
          </table:table-cell>
          <table:table-cell table:style-name="Tabla31.A1" office:value-type="string">
            <text:p text:style-name="P199" loext:marker-style-name="T36"><text:span text:style-name="T36">15</text:span><text:span text:style-name="T36"/></text:p>
          </table:table-cell>
          <table:table-cell table:style-name="Tabla31.A1" office:value-type="string">
            <text:p text:style-name="P199" loext:marker-style-name="T36"><text:span text:style-name="T36">14220</text:span><text:span text:style-name="T36"/></text:p>
          </table:table-cell>
        </table:table-row>
        <table:table-row table:style-name="Tabla31.2">
          <table:table-cell table:style-name="Tabla31.A1" office:value-type="string">
            <text:p text:style-name="P198" loext:marker-style-name="T36"><text:span text:style-name="T36">Estampador</text:span><text:span text:style-name="T36"/></text:p>
          </table:table-cell>
          <table:table-cell table:style-name="Tabla31.A1" office:value-type="string">
            <text:p text:style-name="P199" loext:marker-style-name="T36"><text:span text:style-name="T36">1</text:span><text:span text:style-name="T36"/></text:p>
          </table:table-cell>
          <table:table-cell table:style-name="Tabla31.A1" office:value-type="string">
            <text:p text:style-name="P199" loext:marker-style-name="T37"><text:span text:style-name="T37">930</text:span><text:span text:style-name="T37"/></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99" loext:marker-style-name="T36"><text:span text:style-name="T36">15</text:span><text:span text:style-name="T36"/></text:p>
          </table:table-cell>
          <table:table-cell table:style-name="Tabla31.A1" office:value-type="string">
            <text:p text:style-name="P199" loext:marker-style-name="T36"><text:span text:style-name="T36">11160</text:span><text:span text:style-name="T36"/></text:p>
          </table:table-cell>
        </table:table-row>
        <table:table-row table:style-name="Tabla31.2">
          <table:table-cell table:style-name="Tabla31.A1" office:value-type="string">
            <text:p text:style-name="P198" loext:marker-style-name="T36"><text:span text:style-name="T36">Personal de venta</text:span><text:span text:style-name="T36"/></text:p>
            <text:p text:style-name="P198" loext:marker-style-name="T36"><text:span text:style-name="T36">GASTOS ADMINISTRATIVOS</text:span><text:span text:style-name="T36"/></text:p>
            <text:p text:style-name="P175" loext:marker-style-name="T36"/>
          </table:table-cell>
          <table:table-cell table:style-name="Tabla31.A1" office:value-type="string">
            <text:p text:style-name="P199" loext:marker-style-name="T36"><text:span text:style-name="T36">1</text:span><text:span text:style-name="T36"/></text:p>
          </table:table-cell>
          <table:table-cell table:style-name="Tabla31.A1" office:value-type="string">
            <text:p text:style-name="P199" loext:marker-style-name="T37"><text:span text:style-name="T37">930</text:span><text:span text:style-name="T37"/></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99" loext:marker-style-name="T36"><text:span text:style-name="T36">930</text:span><text:span text:style-name="T36"/></text:p>
          </table:table-cell>
          <table:table-cell table:style-name="Tabla31.A1" office:value-type="string">
            <text:p text:style-name="P199" loext:marker-style-name="T36"><text:span text:style-name="T36">15</text:span><text:span text:style-name="T36"/></text:p>
          </table:table-cell>
          <table:table-cell table:style-name="Tabla31.A1" office:value-type="string">
            <text:p text:style-name="P199" loext:marker-style-name="T36"><text:span text:style-name="T36">11160</text:span><text:span text:style-name="T36"/></text:p>
          </table:table-cell>
        </table:table-row>
        <table:table-row table:style-name="Tabla31.2">
          <table:table-cell table:style-name="Tabla31.A1" office:value-type="string">
            <text:p text:style-name="P198" loext:marker-style-name="T36"><text:span text:style-name="T36">Total</text:span><text:span text:style-name="T36"/></text:p>
          </table:table-cell>
          <table:table-cell table:style-name="Tabla31.A1" office:value-type="string">
            <text:p text:style-name="P199" loext:marker-style-name="T36"><text:span text:style-name="T36">5</text:span><text:span text:style-name="T36"/></text:p>
          </table:table-cell>
          <table:table-cell table:style-name="Tabla31.A1" office:value-type="string">
            <text:p text:style-name="P199" loext:marker-style-name="T36"><text:span text:style-name="T36">5175</text:span><text:span text:style-name="T36"/></text:p>
          </table:table-cell>
          <table:table-cell table:style-name="Tabla31.A1" office:value-type="string">
            <text:p text:style-name="P199" loext:marker-style-name="T36"><text:span text:style-name="T36">5175</text:span><text:span text:style-name="T36"/></text:p>
          </table:table-cell>
          <table:table-cell table:style-name="Tabla31.A1" office:value-type="string">
            <text:p text:style-name="P199" loext:marker-style-name="T36"><text:span text:style-name="T36">5175</text:span><text:span text:style-name="T36"/></text:p>
          </table:table-cell>
          <table:table-cell table:style-name="Tabla31.A1" office:value-type="string">
            <text:p text:style-name="P199" loext:marker-style-name="T36"><text:span text:style-name="T36">45</text:span><text:span text:style-name="T36"/></text:p>
          </table:table-cell>
          <table:table-cell table:style-name="Tabla31.A1" office:value-type="string">
            <text:p text:style-name="P199" loext:marker-style-name="T36"><text:span text:style-name="T36">62100</text:span><text:span text:style-name="T36"/></text:p>
          </table:table-cell>
        </table:table-row>
      </table:table>
      <text:p text:style-name="P120" loext:marker-style-name="T67"><text:bookmark text:name="_heading=h.xvir7l"/><text:span text:style-name="T67">Elaboración: propia</text:span><text:span text:style-name="T67"/></text:p>
      <text:list text:continue-numbering="true" text:style-name="WWNum17">
        <text:list-item>
          <text:list>
            <text:list-item>
              <text:h text:style-name="P83" text:outline-level="2"><text:bookmark text:name="_heading=h.3hv69ve"/><text:tab/><text:bookmark-start text:name="_Toc106699174"/>Estudio tributario<text:bookmark-end text:name="_Toc106699174"/></text:h>
              <text:list>
                <text:list-item>
                  <text:h text:style-name="P86" text:outline-level="3"><text:bookmark text:name="_heading=h.1x0gk37"/><text:bookmark-start text:name="_Toc106699175"/>Régimen Tributario<text:bookmark-end text:name="_Toc106699175"/> </text:h>
                </text:list-item>
              </text:list>
            </text:list-item>
          </text:list>
        </text:list-item>
      </text:list>
      <text:p text:style-name="P118" loext:marker-style-name="T52">De acuerdo con nuestra capacidad de producción lo cual influirá en las ventas se proyecta que nuestros ingresos serán de S/.120,120.00 anual lo cual equivale a 28 UIT que son menores a S/.525,000, por lo cual nos acogeremos al<text:span text:style-name="T52">, Régimen Especial Tributario.</text:span><text:span text:style-name="T52"/></text:p>
      <text:h text:style-name="Heading_20_1" text:outline-level="1" loext:marker-style-name="T69"><text:bookmark-start text:name="_Toc106699176"/><text:span text:style-name="T4">5. Capítulo V. Inversión y valor de recupero</text:span><text:bookmark-end text:name="_Toc106699176"/><text:span text:style-name="T69"/></text:h>
      <text:h text:style-name="P78" text:outline-level="2" loext:marker-style-name="T70"><text:bookmark-start text:name="_Toc106699177"/><text:span text:style-name="T4">5.1. Presupuesto de Inversión</text:span><text:bookmark-end text:name="_Toc106699177"/><text:span text:style-name="T70"/></text:h>
      <text:p text:style-name="Standard" loext:marker-style-name="T4"><text:span text:style-name="T4">La inversión inicial en activos será de S/. 11,955 y una inversión en capital de trabajo de S/. 11,811 lo cual detallaremos a continuación tanto en inversiones tangibles, intangibles y capital de trabajo.</text:span><text:span text:style-name="T4"/></text:p>
      <text:h text:style-name="P85" text:outline-level="3" loext:marker-style-name="T71"><text:bookmark-start text:name="_Toc106699178"/><text:span text:style-name="T4">5.1.1. Activos Fijos</text:span><text:bookmark-end text:name="_Toc106699178"/><text:span text:style-name="T71"/></text:h>
      <text:p text:style-name="P202" loext:marker-style-name="T14"><text:bookmark-start text:name="_Toc75271097"/><text:bookmark-start text:name="_Toc106698912"/><text:bookmark-start text:name="_Toc75271344"/><text:bookmark-start text:name="_Toc75271195"/><text:span text:style-name="T14">Tabla </text:span><text:bookmark-end text:name="_Toc75271097"/><text:bookmark-end text:name="_Toc106698912"/><text:bookmark-end text:name="_Toc75271344"/><text:bookmark-end text:name="_Toc75271195"/><text:span text:style-name="T14"><text:sequence text:ref-name="refTable13" text:name="Table" text:formula="ooow:Table+1" style:num-format="1">14</text:sequence></text:span><text:span text:style-name="T14"><text:s/></text:span></text:p>
      <text:p text:style-name="P202" loext:marker-style-name="T4"><text:span text:style-name="T4">Inversión en maquinaria y equipo de producción</text:span><text:span text:style-name="T4"/></text:p>
      <table:table table:name="Tabla32" table:style-name="Tabla32">
        <table:table-column table:style-name="Tabla32.A"/>
        <table:table-column table:style-name="Tabla32.B"/>
        <table:table-column table:style-name="Tabla32.C"/>
        <table:table-column table:style-name="Tabla32.D"/>
        <table:table-column table:style-name="Tabla32.E"/>
        <text:soft-page-break/>
        <table:table-row table:style-name="Tabla32.1">
          <table:table-cell table:style-name="Tabla32.A1" office:value-type="string">
            <text:p text:style-name="P3" loext:marker-style-name="T41"><text:span text:style-name="T41">Detalle de inversión</text:span><text:span text:style-name="T41"/></text:p>
          </table:table-cell>
          <table:table-cell table:style-name="Tabla32.A1" office:value-type="string">
            <text:p text:style-name="P3" loext:marker-style-name="T41"><text:span text:style-name="T41">Cantidad</text:span><text:span text:style-name="T41"/></text:p>
          </table:table-cell>
          <table:table-cell table:style-name="Tabla32.A1" office:value-type="string">
            <text:p text:style-name="P3" loext:marker-style-name="T41"><text:span text:style-name="T41">Costo unitario</text:span><text:span text:style-name="T41"/></text:p>
          </table:table-cell>
          <table:table-cell table:style-name="Tabla32.A1" office:value-type="string">
            <text:p text:style-name="P3" loext:marker-style-name="T41"><text:span text:style-name="T41">Costo total</text:span><text:span text:style-name="T41"/></text:p>
          </table:table-cell>
          <table:table-cell table:style-name="Tabla32.A1" office:value-type="string">
            <text:p text:style-name="P3" loext:marker-style-name="T41"><text:span text:style-name="T41">Porcentaje</text:span><text:span text:style-name="T41"/></text:p>
          </table:table-cell>
        </table:table-row>
        <table:table-row table:style-name="Tabla32.2">
          <table:table-cell table:style-name="Tabla32.A2" office:value-type="string">
            <text:p text:style-name="P3" loext:marker-style-name="T41"><text:span text:style-name="T41">Computadora portátil laptop</text:span><text:span text:style-name="T41"/></text:p>
          </table:table-cell>
          <table:table-cell table:style-name="Tabla32.A2" office:value-type="string">
            <text:p text:style-name="P3" loext:marker-style-name="T41"><text:span text:style-name="T41">2</text:span><text:span text:style-name="T41"/></text:p>
          </table:table-cell>
          <table:table-cell table:style-name="Tabla32.A2" office:value-type="string">
            <text:p text:style-name="P3" loext:marker-style-name="T41"><text:span text:style-name="T41">1,899</text:span><text:span text:style-name="T41"/></text:p>
          </table:table-cell>
          <table:table-cell table:style-name="Tabla32.A2" office:value-type="string">
            <text:p text:style-name="P3" loext:marker-style-name="T41"><text:span text:style-name="T41">3,798</text:span><text:span text:style-name="T41"/></text:p>
          </table:table-cell>
          <table:table-cell table:style-name="Tabla32.A2" office:value-type="string">
            <text:p text:style-name="P3" loext:marker-style-name="T41"><text:span text:style-name="T41">31.77%</text:span><text:span text:style-name="T41"/></text:p>
          </table:table-cell>
        </table:table-row>
        <table:table-row table:style-name="Tabla32.3">
          <table:table-cell table:style-name="Tabla32.A2" office:value-type="string">
            <text:p text:style-name="P3" loext:marker-style-name="T41"><text:span text:style-name="T41">Impresora</text:span><text:span text:style-name="T41"/></text:p>
          </table:table-cell>
          <table:table-cell table:style-name="Tabla32.A2" office:value-type="string">
            <text:p text:style-name="P3" loext:marker-style-name="T41"><text:span text:style-name="T41">1</text:span><text:span text:style-name="T41"/></text:p>
          </table:table-cell>
          <table:table-cell table:style-name="Tabla32.A2" office:value-type="string">
            <text:p text:style-name="P3" loext:marker-style-name="T41"><text:span text:style-name="T41">1,559</text:span><text:span text:style-name="T41"/></text:p>
          </table:table-cell>
          <table:table-cell table:style-name="Tabla32.A2" office:value-type="string">
            <text:p text:style-name="P3" loext:marker-style-name="T41"><text:span text:style-name="T41">1,559</text:span><text:span text:style-name="T41"/></text:p>
          </table:table-cell>
          <table:table-cell table:style-name="Tabla32.A2" office:value-type="string">
            <text:p text:style-name="P3" loext:marker-style-name="T41"><text:span text:style-name="T41">13.04%</text:span><text:span text:style-name="T41"/></text:p>
          </table:table-cell>
        </table:table-row>
        <table:table-row table:style-name="Tabla32.3">
          <table:table-cell table:style-name="Tabla32.A2" office:value-type="string">
            <text:p text:style-name="P3" loext:marker-style-name="T41"><text:span text:style-name="T41">Plancha plana (estampado)</text:span><text:span text:style-name="T41"/></text:p>
          </table:table-cell>
          <table:table-cell table:style-name="Tabla32.A2" office:value-type="string">
            <text:p text:style-name="P3" loext:marker-style-name="T41"><text:span text:style-name="T41">1</text:span><text:span text:style-name="T41"/></text:p>
          </table:table-cell>
          <table:table-cell table:style-name="Tabla32.A2" office:value-type="string">
            <text:p text:style-name="P3" loext:marker-style-name="T41"><text:span text:style-name="T41">1,500</text:span><text:span text:style-name="T41"/></text:p>
          </table:table-cell>
          <table:table-cell table:style-name="Tabla32.A2" office:value-type="string">
            <text:p text:style-name="P3" loext:marker-style-name="T41"><text:span text:style-name="T41">1,500</text:span><text:span text:style-name="T41"/></text:p>
          </table:table-cell>
          <table:table-cell table:style-name="Tabla32.A2" office:value-type="string">
            <text:p text:style-name="P3" loext:marker-style-name="T41"><text:span text:style-name="T41">12.55%</text:span><text:span text:style-name="T41"/></text:p>
          </table:table-cell>
        </table:table-row>
        <table:table-row table:style-name="Tabla32.3">
          <table:table-cell table:style-name="Tabla32.A2" office:value-type="string">
            <text:p text:style-name="P3" loext:marker-style-name="T41"><text:span text:style-name="T41">Pistola etiquetadora textil</text:span><text:span text:style-name="T41"/></text:p>
          </table:table-cell>
          <table:table-cell table:style-name="Tabla32.A2" office:value-type="string">
            <text:p text:style-name="P3" loext:marker-style-name="T41"><text:span text:style-name="T41">1</text:span><text:span text:style-name="T41"/></text:p>
          </table:table-cell>
          <table:table-cell table:style-name="Tabla32.A2" office:value-type="string">
            <text:p text:style-name="P3" loext:marker-style-name="T41"><text:span text:style-name="T41">27</text:span><text:span text:style-name="T41"/></text:p>
          </table:table-cell>
          <table:table-cell table:style-name="Tabla32.A2" office:value-type="string">
            <text:p text:style-name="P3" loext:marker-style-name="T41"><text:span text:style-name="T41">27</text:span><text:span text:style-name="T41"/></text:p>
          </table:table-cell>
          <table:table-cell table:style-name="Tabla32.A2" office:value-type="string">
            <text:p text:style-name="P3" loext:marker-style-name="T41"><text:span text:style-name="T41">0.23%</text:span><text:span text:style-name="T41"/></text:p>
          </table:table-cell>
        </table:table-row>
        <table:table-row table:style-name="Tabla32.6">
          <table:table-cell table:style-name="Tabla32.A6" table:number-columns-spanned="3" office:value-type="string">
            <text:p text:style-name="P3" loext:marker-style-name="T41"><text:span text:style-name="T41">Total</text:span><text:span text:style-name="T41"/></text:p>
          </table:table-cell>
          <table:covered-table-cell/>
          <table:covered-table-cell/>
          <table:table-cell table:style-name="Tabla32.A6" office:value-type="string">
            <text:p text:style-name="P3" loext:marker-style-name="T41"><text:span text:style-name="T41">6,884</text:span><text:span text:style-name="T41"/></text:p>
          </table:table-cell>
          <table:table-cell table:style-name="Tabla32.A6" office:value-type="string">
            <text:p text:style-name="P3" loext:marker-style-name="T41"><text:span text:style-name="T41">57.58%</text:span><text:span text:style-name="T41"/></text:p>
          </table:table-cell>
        </table:table-row>
      </table:table>
      <text:p text:style-name="P109" loext:marker-style-name="T4"><text:span text:style-name="T15">Nota.</text:span><text:span text:style-name="T4"> Elaboración propia.</text:span></text:p>
      <text:p text:style-name="P202" loext:marker-style-name="T14"><text:bookmark-start text:name="_Toc75271098"/><text:bookmark-start text:name="_Toc106698913"/><text:bookmark-start text:name="_Toc75271345"/><text:bookmark-start text:name="_Toc75271196"/><text:span text:style-name="T14">Tabla </text:span><text:bookmark-end text:name="_Toc75271098"/><text:bookmark-end text:name="_Toc106698913"/><text:bookmark-end text:name="_Toc75271345"/><text:bookmark-end text:name="_Toc75271196"/><text:span text:style-name="T14"><text:sequence text:ref-name="refTable14" text:name="Table" text:formula="ooow:Table+1" style:num-format="1">15</text:sequence></text:span><text:span text:style-name="T14"><text:s/></text:span></text:p>
      <text:p text:style-name="P202" loext:marker-style-name="T4"><text:span text:style-name="T4">Inversión en muebles, enseres y equipos de administración</text:span><text:span text:style-name="T4"/></text:p>
      <table:table table:name="Tabla33" table:style-name="Tabla33">
        <table:table-column table:style-name="Tabla33.A"/>
        <table:table-column table:style-name="Tabla33.B"/>
        <table:table-column table:style-name="Tabla33.C"/>
        <table:table-column table:style-name="Tabla33.D"/>
        <table:table-column table:style-name="Tabla33.E"/>
        <table:table-row table:style-name="Tabla33.1">
          <table:table-cell table:style-name="Tabla33.A1" office:value-type="string">
            <text:p text:style-name="P3" loext:marker-style-name="T44"><text:span text:style-name="T44">Detalle de inversión</text:span><text:span text:style-name="T44"/></text:p>
          </table:table-cell>
          <table:table-cell table:style-name="Tabla33.A1" office:value-type="string">
            <text:p text:style-name="P3" loext:marker-style-name="T44"><text:span text:style-name="T44">Cantidad</text:span><text:span text:style-name="T44"/></text:p>
          </table:table-cell>
          <table:table-cell table:style-name="Tabla33.A1" office:value-type="string">
            <text:p text:style-name="P3" loext:marker-style-name="T44"><text:span text:style-name="T44">Costo unitario</text:span><text:span text:style-name="T44"/></text:p>
          </table:table-cell>
          <table:table-cell table:style-name="Tabla33.A1" office:value-type="string">
            <text:p text:style-name="P3" loext:marker-style-name="T44"><text:span text:style-name="T44">Costo total</text:span><text:span text:style-name="T44"/></text:p>
          </table:table-cell>
          <table:table-cell table:style-name="Tabla33.A1" office:value-type="string">
            <text:p text:style-name="P3" loext:marker-style-name="T44"><text:span text:style-name="T44">Porcentaje</text:span><text:span text:style-name="T44"/></text:p>
          </table:table-cell>
        </table:table-row>
        <table:table-row table:style-name="Tabla33.2">
          <table:table-cell table:style-name="Tabla33.A2" office:value-type="string">
            <text:p text:style-name="P3" loext:marker-style-name="T41"><text:span text:style-name="T41">Escritorio para computador</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130</text:span><text:span text:style-name="T41"/></text:p>
          </table:table-cell>
          <table:table-cell table:style-name="Tabla33.A2" office:value-type="string">
            <text:p text:style-name="P3" loext:marker-style-name="T41"><text:span text:style-name="T41">130</text:span><text:span text:style-name="T41"/></text:p>
          </table:table-cell>
          <table:table-cell table:style-name="Tabla33.A2" office:value-type="string">
            <text:p text:style-name="P3" loext:marker-style-name="T41"><text:span text:style-name="T41">1.09%</text:span><text:span text:style-name="T41"/></text:p>
          </table:table-cell>
        </table:table-row>
        <table:table-row table:style-name="Tabla33.3">
          <table:table-cell table:style-name="Tabla33.A2" office:value-type="string">
            <text:p text:style-name="P3" loext:marker-style-name="T41"><text:span text:style-name="T41">Silla de escritorio</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50</text:span><text:span text:style-name="T41"/></text:p>
          </table:table-cell>
          <table:table-cell table:style-name="Tabla33.A2" office:value-type="string">
            <text:p text:style-name="P3" loext:marker-style-name="T41"><text:span text:style-name="T41">50</text:span><text:span text:style-name="T41"/></text:p>
          </table:table-cell>
          <table:table-cell table:style-name="Tabla33.A2" office:value-type="string">
            <text:p text:style-name="P3" loext:marker-style-name="T41"><text:span text:style-name="T41">0.42%</text:span><text:span text:style-name="T41"/></text:p>
          </table:table-cell>
        </table:table-row>
        <table:table-row table:style-name="Tabla33.4">
          <table:table-cell table:style-name="Tabla33.A2" office:value-type="string">
            <text:p text:style-name="P3" loext:marker-style-name="T41"><text:span text:style-name="T41">Silla</text:span><text:span text:style-name="T41"/></text:p>
          </table:table-cell>
          <table:table-cell table:style-name="Tabla33.A2" office:value-type="string">
            <text:p text:style-name="P3" loext:marker-style-name="T41"><text:span text:style-name="T41">2</text:span><text:span text:style-name="T41"/></text:p>
          </table:table-cell>
          <table:table-cell table:style-name="Tabla33.A2" office:value-type="string">
            <text:p text:style-name="P3" loext:marker-style-name="T41"><text:span text:style-name="T41">30</text:span><text:span text:style-name="T41"/></text:p>
          </table:table-cell>
          <table:table-cell table:style-name="Tabla33.A2" office:value-type="string">
            <text:p text:style-name="P3" loext:marker-style-name="T41"><text:span text:style-name="T41">60</text:span><text:span text:style-name="T41"/></text:p>
          </table:table-cell>
          <table:table-cell table:style-name="Tabla33.A2" office:value-type="string">
            <text:p text:style-name="P3" loext:marker-style-name="T41"><text:span text:style-name="T41">0.50%</text:span><text:span text:style-name="T41"/></text:p>
          </table:table-cell>
        </table:table-row>
        <table:table-row table:style-name="Tabla33.5">
          <table:table-cell table:style-name="Tabla33.A2" office:value-type="string">
            <text:p text:style-name="P3" loext:marker-style-name="T41"><text:span text:style-name="T41">Exhibidor de polos</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220</text:span><text:span text:style-name="T41"/></text:p>
          </table:table-cell>
          <table:table-cell table:style-name="Tabla33.A2" office:value-type="string">
            <text:p text:style-name="P3" loext:marker-style-name="T41"><text:span text:style-name="T41">220</text:span><text:span text:style-name="T41"/></text:p>
          </table:table-cell>
          <table:table-cell table:style-name="Tabla33.A2" office:value-type="string">
            <text:p text:style-name="P3" loext:marker-style-name="T41"><text:span text:style-name="T41">1.84%</text:span><text:span text:style-name="T41"/></text:p>
          </table:table-cell>
        </table:table-row>
        <table:table-row table:style-name="Tabla33.6">
          <table:table-cell table:style-name="Tabla33.A2" office:value-type="string">
            <text:p text:style-name="P3" loext:marker-style-name="T41"><text:span text:style-name="T41">Espejo para vestidor</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15</text:span><text:span text:style-name="T41"/></text:p>
          </table:table-cell>
          <table:table-cell table:style-name="Tabla33.A2" office:value-type="string">
            <text:p text:style-name="P3" loext:marker-style-name="T41"><text:span text:style-name="T41">15</text:span><text:span text:style-name="T41"/></text:p>
          </table:table-cell>
          <table:table-cell table:style-name="Tabla33.A2" office:value-type="string">
            <text:p text:style-name="P3" loext:marker-style-name="T41"><text:span text:style-name="T41">0.13%</text:span><text:span text:style-name="T41"/></text:p>
          </table:table-cell>
        </table:table-row>
        <table:table-row table:style-name="Tabla33.7">
          <table:table-cell table:style-name="Tabla33.A2" office:value-type="string">
            <text:p text:style-name="P3" loext:marker-style-name="T41"><text:span text:style-name="T41">Probador vestidor de metal</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49</text:span><text:span text:style-name="T41"/></text:p>
          </table:table-cell>
          <table:table-cell table:style-name="Tabla33.A2" office:value-type="string">
            <text:p text:style-name="P3" loext:marker-style-name="T41"><text:span text:style-name="T41">49</text:span><text:span text:style-name="T41"/></text:p>
          </table:table-cell>
          <table:table-cell table:style-name="Tabla33.A2" office:value-type="string">
            <text:p text:style-name="P3" loext:marker-style-name="T41"><text:span text:style-name="T41">0.41%</text:span><text:span text:style-name="T41"/></text:p>
          </table:table-cell>
        </table:table-row>
        <table:table-row table:style-name="Tabla33.3">
          <table:table-cell table:style-name="Tabla33.A2" office:value-type="string">
            <text:p text:style-name="P3" loext:marker-style-name="T41"><text:span text:style-name="T41">Cortina de vestidor de polos</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30</text:span><text:span text:style-name="T41"/></text:p>
          </table:table-cell>
          <table:table-cell table:style-name="Tabla33.A2" office:value-type="string">
            <text:p text:style-name="P3" loext:marker-style-name="T41"><text:span text:style-name="T41">30</text:span><text:span text:style-name="T41"/></text:p>
          </table:table-cell>
          <table:table-cell table:style-name="Tabla33.A2" office:value-type="string">
            <text:p text:style-name="P3" loext:marker-style-name="T41"><text:span text:style-name="T41">0.25%</text:span><text:span text:style-name="T41"/></text:p>
          </table:table-cell>
        </table:table-row>
        <table:table-row table:style-name="Tabla33.9">
          <table:table-cell table:style-name="Tabla33.A2" office:value-type="string">
            <text:p text:style-name="P3" loext:marker-style-name="T41"><text:span text:style-name="T41">Moto lineal (eléctrica)</text:span><text:span text:style-name="T41"/></text:p>
          </table:table-cell>
          <table:table-cell table:style-name="Tabla33.A2" office:value-type="string">
            <text:p text:style-name="P3" loext:marker-style-name="T41"><text:span text:style-name="T41">1</text:span><text:span text:style-name="T41"/></text:p>
          </table:table-cell>
          <table:table-cell table:style-name="Tabla33.A2" office:value-type="string">
            <text:p text:style-name="P3" loext:marker-style-name="T41"><text:span text:style-name="T41">3,400</text:span><text:span text:style-name="T41"/></text:p>
          </table:table-cell>
          <table:table-cell table:style-name="Tabla33.A2" office:value-type="string">
            <text:p text:style-name="P3" loext:marker-style-name="T41"><text:span text:style-name="T41">3,400</text:span><text:span text:style-name="T41"/></text:p>
          </table:table-cell>
          <table:table-cell table:style-name="Tabla33.A2" office:value-type="string">
            <text:p text:style-name="P3" loext:marker-style-name="T41"><text:span text:style-name="T41">28.44%</text:span><text:span text:style-name="T41"/></text:p>
          </table:table-cell>
        </table:table-row>
        <table:table-row table:style-name="Tabla33.5">
          <table:table-cell table:style-name="Tabla33.A10" table:number-columns-spanned="3" office:value-type="string">
            <text:p text:style-name="P3" loext:marker-style-name="T41"><text:span text:style-name="T41">Total</text:span><text:span text:style-name="T41"/></text:p>
          </table:table-cell>
          <table:covered-table-cell/>
          <table:covered-table-cell/>
          <table:table-cell table:style-name="Tabla33.A10" office:value-type="string">
            <text:p text:style-name="P3" loext:marker-style-name="T41"><text:span text:style-name="T41">3,954</text:span><text:span text:style-name="T41"/></text:p>
          </table:table-cell>
          <table:table-cell table:style-name="Tabla33.A10" office:value-type="string">
            <text:p text:style-name="P3" loext:marker-style-name="T41"><text:span text:style-name="T41">33.07%</text:span><text:span text:style-name="T41"/></text:p>
          </table:table-cell>
        </table:table-row>
      </table:table>
      <text:p text:style-name="P109" loext:marker-style-name="T4"><text:span text:style-name="T15">Nota</text:span><text:span text:style-name="T4">. Elaboración propia.</text:span></text:p>
      <text:h text:style-name="P85" text:outline-level="3" loext:marker-style-name="T72"><text:bookmark-start text:name="_Toc106699179"/><text:span text:style-name="T4">5.1.2. Inversión en Activos Intangibles</text:span><text:bookmark-end text:name="_Toc106699179"/><text:span text:style-name="T72"/></text:h>
      <text:p text:style-name="P202" loext:marker-style-name="T14"><text:bookmark-start text:name="_Toc75271099"/><text:bookmark-start text:name="_Toc106698914"/><text:bookmark-start text:name="_Toc75271346"/><text:bookmark-start text:name="_Toc75271197"/><text:span text:style-name="T14">Tabla </text:span><text:bookmark-end text:name="_Toc75271099"/><text:bookmark-end text:name="_Toc106698914"/><text:bookmark-end text:name="_Toc75271346"/><text:bookmark-end text:name="_Toc75271197"/><text:span text:style-name="T14"><text:sequence text:ref-name="refTable15" text:name="Table" text:formula="ooow:Table+1" style:num-format="1">16</text:sequence></text:span><text:span text:style-name="T14"><text:s/></text:span></text:p>
      <text:p text:style-name="P202" loext:marker-style-name="T4"><text:span text:style-name="T4">Inversión en activos intangibles</text:span><text:span text:style-name="T4"/></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 loext:marker-style-name="T16"><text:span text:style-name="T16">Detalle de inversión</text:span><text:span text:style-name="T16"/></text:p>
          </table:table-cell>
          <table:table-cell table:style-name="Tabla34.A1" office:value-type="string">
            <text:p text:style-name="P1" loext:marker-style-name="T16"><text:span text:style-name="T16">Costo</text:span><text:span text:style-name="T16"/></text:p>
          </table:table-cell>
          <table:table-cell table:style-name="Tabla34.A1" office:value-type="string">
            <text:p text:style-name="P1" loext:marker-style-name="T16"><text:span text:style-name="T16">Porcentaje</text:span><text:span text:style-name="T16"/></text:p>
          </table:table-cell>
        </table:table-row>
        <table:table-row table:style-name="Tabla34.2">
          <table:table-cell table:style-name="Tabla34.A2" office:value-type="string">
            <text:p text:style-name="P3" loext:marker-style-name="T16"><text:span text:style-name="T16">Registro de marca y logo</text:span><text:span text:style-name="T16"/></text:p>
          </table:table-cell>
          <table:table-cell table:style-name="Tabla34.A2" office:value-type="string">
            <text:p text:style-name="P1" loext:marker-style-name="T16"><text:span text:style-name="T16">535</text:span><text:span text:style-name="T16"/></text:p>
          </table:table-cell>
          <table:table-cell table:style-name="Tabla34.A2" office:value-type="string">
            <text:p text:style-name="P1" loext:marker-style-name="T16"><text:span text:style-name="T16">4.48%</text:span><text:span text:style-name="T16"/></text:p>
          </table:table-cell>
        </table:table-row>
        <table:table-row table:style-name="Tabla34.3">
          <table:table-cell table:style-name="Tabla34.A2" office:value-type="string">
            <text:p text:style-name="P3" loext:marker-style-name="T16"><text:span text:style-name="T16">Constitución de la empresa</text:span><text:span text:style-name="T16"/></text:p>
          </table:table-cell>
          <table:table-cell table:style-name="Tabla34.A2" office:value-type="string">
            <text:p text:style-name="P1" loext:marker-style-name="T16"><text:span text:style-name="T16">477</text:span><text:span text:style-name="T16"/></text:p>
          </table:table-cell>
          <table:table-cell table:style-name="Tabla34.A2" office:value-type="string">
            <text:p text:style-name="P1" loext:marker-style-name="T16"><text:span text:style-name="T16">3.99%</text:span><text:span text:style-name="T16"/></text:p>
          </table:table-cell>
        </table:table-row>
        <table:table-row table:style-name="Tabla34.4">
          <table:table-cell table:style-name="Tabla34.A2" office:value-type="string">
            <text:p text:style-name="P3" loext:marker-style-name="T16"><text:span text:style-name="T16">Capacitación al personal</text:span><text:span text:style-name="T16"/></text:p>
          </table:table-cell>
          <table:table-cell table:style-name="Tabla34.A2" office:value-type="string">
            <text:p text:style-name="P1" loext:marker-style-name="T16"><text:span text:style-name="T16">60</text:span><text:span text:style-name="T16"/></text:p>
          </table:table-cell>
          <table:table-cell table:style-name="Tabla34.A2" office:value-type="string">
            <text:p text:style-name="P1" loext:marker-style-name="T16"><text:span text:style-name="T16">0.50%</text:span><text:span text:style-name="T16"/></text:p>
          </table:table-cell>
        </table:table-row>
        <table:table-row table:style-name="Tabla34.5">
          <table:table-cell table:style-name="Tabla34.A2" office:value-type="string">
            <text:p text:style-name="P3" loext:marker-style-name="T16"><text:span text:style-name="T16">Inscripción en SUNARP</text:span><text:span text:style-name="T16"/></text:p>
          </table:table-cell>
          <table:table-cell table:style-name="Tabla34.A2" office:value-type="string">
            <text:p text:style-name="P1" loext:marker-style-name="T16"><text:span text:style-name="T16">45</text:span><text:span text:style-name="T16"/></text:p>
          </table:table-cell>
          <table:table-cell table:style-name="Tabla34.A2" office:value-type="string">
            <text:p text:style-name="P1" loext:marker-style-name="T16"><text:span text:style-name="T16">0.38%</text:span><text:span text:style-name="T16"/></text:p>
          </table:table-cell>
        </table:table-row>
        <table:table-row table:style-name="Tabla34.6">
          <table:table-cell table:style-name="Tabla34.A6" office:value-type="string">
            <text:p text:style-name="P3" loext:marker-style-name="T16"><text:span text:style-name="T16">Total, gastos preoperativos</text:span><text:span text:style-name="T16"/></text:p>
          </table:table-cell>
          <table:table-cell table:style-name="Tabla34.A6" office:value-type="string">
            <text:p text:style-name="P1" loext:marker-style-name="T16"><text:span text:style-name="T16">1,117</text:span><text:span text:style-name="T16"/></text:p>
          </table:table-cell>
          <table:table-cell table:style-name="Tabla34.A6" office:value-type="string">
            <text:p text:style-name="P1" loext:marker-style-name="T16"><text:span text:style-name="T16">9.34%</text:span><text:span text:style-name="T16"/></text:p>
          </table:table-cell>
        </table:table-row>
      </table:table>
      <text:p text:style-name="P109" loext:marker-style-name="T4"><text:span text:style-name="T15">Nota.</text:span><text:span text:style-name="T4"> Elaboración propia.</text:span></text:p>
      <text:h text:style-name="P85" text:outline-level="3" loext:marker-style-name="T72"><text:bookmark-start text:name="_Toc106699180"/><text:span text:style-name="T4">5.1.3</text:span><text:span text:style-name="T73">. <text:s/></text:span><text:span text:style-name="T4">Inversión en Capital de Trabajo</text:span><text:bookmark-end text:name="_Toc106699180"/></text:h>
      <text:p text:style-name="Standard" loext:marker-style-name="T4"><text:span text:style-name="T4">El cálculo del capital de trabajo se realizó mediante el método del periodo de desfase. En el cual se consideró el total de costos operacionales menos la depreciación y amortización para hallar costo operacional.</text:span><text:span text:style-name="T4"/></text:p>
      <table:table table:name="Tabla35" table:style-name="Tabla35">
        <table:table-column table:style-name="Tabla35.A"/>
        <table:table-column table:style-name="Tabla35.B"/>
        <text:soft-page-break/>
        <table:table-row table:style-name="Tabla35.1">
          <table:table-cell table:style-name="Tabla35.A1" table:number-columns-spanned="2" office:value-type="string">
            <text:p text:style-name="P116" loext:marker-style-name="T17"><text:span text:style-name="T17">Cálculo del capital de trabajo ICT= CO (COPD)</text:span><text:span text:style-name="T17"/></text:p>
          </table:table-cell>
          <table:covered-table-cell/>
        </table:table-row>
        <table:table-row table:style-name="Tabla35.1">
          <table:table-cell table:style-name="Tabla35.A1" office:value-type="string">
            <text:p text:style-name="P116" loext:marker-style-name="T17"><text:span text:style-name="T17">Total, costos operacionales</text:span><text:span text:style-name="T17"/></text:p>
          </table:table-cell>
          <table:table-cell table:style-name="Tabla35.A1" office:value-type="string">
            <text:p text:style-name="P116" loext:marker-style-name="T17"><text:span text:style-name="T17">11757.11</text:span><text:span text:style-name="T17"/></text:p>
          </table:table-cell>
        </table:table-row>
        <table:table-row table:style-name="Tabla35.1">
          <table:table-cell table:style-name="Tabla35.A1" office:value-type="string">
            <text:p text:style-name="P116" loext:marker-style-name="T17"><text:span text:style-name="T17">(-) depreciación</text:span><text:span text:style-name="T17"/></text:p>
          </table:table-cell>
          <table:table-cell table:style-name="Tabla35.A1" office:value-type="string">
            <text:p text:style-name="P116" loext:marker-style-name="T17"><text:span text:style-name="T17">-353.10</text:span><text:span text:style-name="T17"/></text:p>
          </table:table-cell>
        </table:table-row>
        <table:table-row table:style-name="Tabla35.1">
          <table:table-cell table:style-name="Tabla35.A1" office:value-type="string">
            <text:p text:style-name="P116" loext:marker-style-name="T17"><text:span text:style-name="T17">(-) amort diferidos</text:span><text:span text:style-name="T17"/></text:p>
          </table:table-cell>
          <table:table-cell table:style-name="Tabla35.A1" office:value-type="string">
            <text:p text:style-name="P116" loext:marker-style-name="T17"><text:span text:style-name="T17">-18.62</text:span><text:span text:style-name="T17"/></text:p>
          </table:table-cell>
        </table:table-row>
        <table:table-row table:style-name="Tabla35.1">
          <table:table-cell table:style-name="Tabla35.A1" office:value-type="string">
            <text:p text:style-name="P116" loext:marker-style-name="T18"><text:span text:style-name="T18">(=) </text:span><text:span text:style-name="T17">Costo operacional mensual</text:span></text:p>
          </table:table-cell>
          <table:table-cell table:style-name="Tabla35.A1" office:value-type="string">
            <text:p text:style-name="P116" loext:marker-style-name="T17"><text:span text:style-name="T17">11385.40</text:span><text:span text:style-name="T17"/></text:p>
          </table:table-cell>
        </table:table-row>
        <table:table-row table:style-name="Tabla35.6">
          <table:table-cell table:style-name="Tabla35.A1" office:value-type="string">
            <text:p text:style-name="P133" loext:marker-style-name="T17"/>
          </table:table-cell>
          <table:table-cell table:style-name="Tabla35.A1" office:value-type="string">
            <text:p text:style-name="P133" loext:marker-style-name="T17"/>
          </table:table-cell>
        </table:table-row>
        <table:table-row table:style-name="Tabla35.1">
          <table:table-cell table:style-name="Tabla35.A1" table:number-columns-spanned="2" office:value-type="string">
            <text:p text:style-name="P116" loext:marker-style-name="T17"><text:span text:style-name="T17">COPD (Costo operacional diario) = COPM/30</text:span><text:span text:style-name="T17"/></text:p>
          </table:table-cell>
          <table:covered-table-cell/>
        </table:table-row>
        <table:table-row table:style-name="Tabla35.1">
          <table:table-cell table:style-name="Tabla35.A1" office:value-type="string">
            <text:p text:style-name="P116" loext:marker-style-name="T17"><text:span text:style-name="T17">COPD =</text:span><text:span text:style-name="T17"/></text:p>
          </table:table-cell>
          <table:table-cell table:style-name="Tabla35.A1" office:value-type="string">
            <text:p text:style-name="P116" loext:marker-style-name="T17"><text:span text:style-name="T17">379.51</text:span><text:span text:style-name="T17"/></text:p>
          </table:table-cell>
        </table:table-row>
        <table:table-row table:style-name="Tabla35.1">
          <table:table-cell table:style-name="Tabla35.A9" office:value-type="string">
            <text:p text:style-name="P116" loext:marker-style-name="T17"><text:span text:style-name="T17">Capital de trabajo</text:span><text:span text:style-name="T17"/></text:p>
          </table:table-cell>
          <table:table-cell table:style-name="Tabla35.A9" office:value-type="string">
            <text:p text:style-name="P116" loext:marker-style-name="T17"><text:span text:style-name="T17">11764.91</text:span><text:span text:style-name="T17"/></text:p>
          </table:table-cell>
        </table:table-row>
      </table:table>
      <text:p text:style-name="Standard" loext:marker-style-name="T4"><text:span text:style-name="T4">El </text:span>proceso se inicia con el primer desembolso para cancelar los insumos de la operación y termina cuando se venden los insumos, transformados en productos terminados; es decir, se toma en cuenta el tiempo que transcurre a partir del momento que la empresa inicia sus actividades productivas hasta cuando se obtiene el valor por la venta de los polos personalizados.</text:p>
      <text:h text:style-name="P80" text:outline-level="2" loext:marker-style-name="T4"><text:bookmark-start text:name="_Toc106699181"/><text:span text:style-name="T4">5.2 Horizonte de Evaluación</text:span><text:bookmark-end text:name="_Toc106699181"/><text:span text:style-name="T4"/></text:h>
      <text:p text:style-name="Standard" loext:marker-style-name="T4"><text:span text:style-name="T22"> </text:span><text:span text:style-name="T4">Se toma un horizonte de evaluación de 5 años en concordancia con el tiempo de vida útil del activo principal de nuestra empresa que es la Plancha Transfer.</text:span></text:p>
      <text:p text:style-name="P131" loext:marker-style-name="T4"/>
      <text:h text:style-name="P78" text:outline-level="2" loext:marker-style-name="T4"><text:bookmark-start text:name="_Toc106699182"/><text:span text:style-name="T4">5.3. <text:s/>Valores de Recupero</text:span><text:bookmark-end text:name="_Toc106699182"/><text:span text:style-name="T4"/></text:h>
      <text:h text:style-name="P85" text:outline-level="3" loext:marker-style-name="T42"><text:bookmark-start text:name="_Toc106699183"/><text:span text:style-name="T34">5.3.1. <text:s/></text:span><text:span text:style-name="T4">Método Contable</text:span><text:bookmark-end text:name="_Toc106699183"/></text:h>
      <text:p text:style-name="Standard" loext:marker-style-name="T23"><text:span text:style-name="T4">Teniendo en cuenta la vida útil de cada activo fijo</text:span><text:span text:style-name="T23">, </text:span><text:span text:style-name="T4">el tiempo de recupero de la inversión es de 5 años</text:span><text:span text:style-name="T23">. </text:span><text:span text:style-name="T4">El Horizonte de evaluación es de 5 años</text:span><text:span text:style-name="T23">.</text:span></text:p>
      <text:p text:style-name="Standard" loext:marker-style-name="T4"><text:span text:style-name="T4">VR= Valor adquisitivo – Depreciación acumulada</text:span><text:span text:style-name="T4"/></text:p>
      <text:p text:style-name="P202" loext:marker-style-name="T14"><text:bookmark-start text:name="_Toc75271100"/><text:bookmark-start text:name="_Toc106698915"/><text:bookmark-start text:name="_Toc75271347"/><text:bookmark-start text:name="_Toc75271198"/><text:span text:style-name="T14">Tabla </text:span><text:bookmark-end text:name="_Toc75271100"/><text:bookmark-end text:name="_Toc106698915"/><text:bookmark-end text:name="_Toc75271347"/><text:bookmark-end text:name="_Toc75271198"/><text:span text:style-name="T14"><text:sequence text:ref-name="refTable16" text:name="Table" text:formula="ooow:Table+1" style:num-format="1">17</text:sequence></text:span><text:span text:style-name="T14"><text:s/></text:span></text:p>
      <text:p text:style-name="P202" loext:marker-style-name="T4"><text:span text:style-name="T4">Tabla de depreciaciones y valor de recupero</text:span><text:span text:style-name="T4"/></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style-name="Tabla36.1">
          <table:table-cell table:style-name="Tabla36.A1" office:value-type="string">
            <text:p text:style-name="P23" loext:marker-style-name="T41"><text:span text:style-name="T41">Activo Fijo</text:span><text:span text:style-name="T41"/></text:p>
          </table:table-cell>
          <table:table-cell table:style-name="Tabla36.A1" office:value-type="string">
            <text:p text:style-name="P23" loext:marker-style-name="T41"><text:span text:style-name="T41">Valor de compra</text:span><text:span text:style-name="T41"/></text:p>
          </table:table-cell>
          <table:table-cell table:style-name="Tabla36.A1" office:value-type="string">
            <text:p text:style-name="P23" loext:marker-style-name="T41"><text:span text:style-name="T41">Vida útil (años)</text:span><text:span text:style-name="T41"/></text:p>
          </table:table-cell>
          <table:table-cell table:style-name="Tabla36.A1" office:value-type="string">
            <text:p text:style-name="P23" loext:marker-style-name="T41"><text:span text:style-name="T41">Tasa de Depreciación</text:span><text:span text:style-name="T41"/></text:p>
          </table:table-cell>
          <table:table-cell table:style-name="Tabla36.A1" office:value-type="string">
            <text:p text:style-name="P23" loext:marker-style-name="T41"><text:span text:style-name="T41">Depreciación anual</text:span><text:span text:style-name="T41"/></text:p>
          </table:table-cell>
          <table:table-cell table:style-name="Tabla36.A1" office:value-type="string">
            <text:p text:style-name="P23" loext:marker-style-name="T41"><text:span text:style-name="T41">Depreciación Acumulada</text:span><text:span text:style-name="T41"/></text:p>
          </table:table-cell>
          <table:table-cell table:style-name="Tabla36.A1" office:value-type="string">
            <text:p text:style-name="P23" loext:marker-style-name="T41"><text:span text:style-name="T41">Valor de recupero</text:span><text:span text:style-name="T41"/></text:p>
          </table:table-cell>
        </table:table-row>
        <table:table-row table:style-name="Tabla36.2">
          <table:table-cell table:style-name="Tabla36.A2" office:value-type="string">
            <text:p text:style-name="P15" loext:marker-style-name="T41"><text:span text:style-name="T41">Equipos</text:span><text:span text:style-name="T41"/></text:p>
          </table:table-cell>
          <table:table-cell table:style-name="Tabla36.A2" office:value-type="string">
            <text:p text:style-name="P23" loext:marker-style-name="T41"><text:span text:style-name="T41">6884</text:span><text:span text:style-name="T41"/></text:p>
          </table:table-cell>
          <table:table-cell table:style-name="Tabla36.A2" office:value-type="string">
            <text:p text:style-name="P34" loext:marker-style-name="T41"/>
          </table:table-cell>
          <table:table-cell table:style-name="Tabla36.A2" office:value-type="string">
            <text:p text:style-name="P34" loext:marker-style-name="T41"/>
          </table:table-cell>
          <table:table-cell table:style-name="Tabla36.A2" office:value-type="string">
            <text:p text:style-name="P22" loext:marker-style-name="T41"><text:span text:style-name="T41">2984</text:span><text:span text:style-name="T41"/></text:p>
          </table:table-cell>
          <table:table-cell table:style-name="Tabla36.A2" office:value-type="string">
            <text:p text:style-name="P34" loext:marker-style-name="T41"/>
          </table:table-cell>
          <table:table-cell table:style-name="Tabla36.A2" office:value-type="string">
            <text:p text:style-name="P22" loext:marker-style-name="T41"><text:span text:style-name="T41">2679</text:span><text:span text:style-name="T41"/></text:p>
          </table:table-cell>
        </table:table-row>
        <table:table-row table:style-name="Tabla36.2">
          <table:table-cell table:style-name="Tabla36.A2" office:value-type="string">
            <text:p text:style-name="P15" loext:marker-style-name="T41"><text:span text:style-name="T41">Computadora portátil Laptop</text:span><text:span text:style-name="T41"/></text:p>
          </table:table-cell>
          <table:table-cell table:style-name="Tabla36.A2" office:value-type="string">
            <text:p text:style-name="P23" loext:marker-style-name="T41"><text:span text:style-name="T41">3798</text:span><text:span text:style-name="T41"/></text:p>
          </table:table-cell>
          <table:table-cell table:style-name="Tabla36.A2" office:value-type="string">
            <text:p text:style-name="P13" loext:marker-style-name="T41"><text:span text:style-name="T41">2</text:span><text:span text:style-name="T41"/></text:p>
          </table:table-cell>
          <table:table-cell table:style-name="Tabla36.A2" office:value-type="string">
            <text:p text:style-name="P22" loext:marker-style-name="T41"><text:span text:style-name="T41">50%</text:span><text:span text:style-name="T41"/></text:p>
          </table:table-cell>
          <table:table-cell table:style-name="Tabla36.A2" office:value-type="string">
            <text:p text:style-name="P22" loext:marker-style-name="T41"><text:span text:style-name="T41">1899</text:span><text:span text:style-name="T41"/></text:p>
          </table:table-cell>
          <table:table-cell table:style-name="Tabla36.A2" office:value-type="string">
            <text:p text:style-name="P22" loext:marker-style-name="T41"><text:span text:style-name="T41">1899</text:span><text:span text:style-name="T41"/></text:p>
          </table:table-cell>
          <table:table-cell table:style-name="Tabla36.A2" office:value-type="string">
            <text:p text:style-name="P22" loext:marker-style-name="T41"><text:span text:style-name="T41">1899</text:span><text:span text:style-name="T41"/></text:p>
          </table:table-cell>
        </table:table-row>
        <table:table-row table:style-name="Tabla36.4">
          <table:table-cell table:style-name="Tabla36.A2" office:value-type="string">
            <text:p text:style-name="P15" loext:marker-style-name="T41"><text:span text:style-name="T41">Impresora </text:span><text:span text:style-name="T41"/></text:p>
          </table:table-cell>
          <table:table-cell table:style-name="Tabla36.A2" office:value-type="string">
            <text:p text:style-name="P23" loext:marker-style-name="T41"><text:span text:style-name="T41">1559</text:span><text:span text:style-name="T41"/></text:p>
          </table:table-cell>
          <table:table-cell table:style-name="Tabla36.A2" office:value-type="string">
            <text:p text:style-name="P22" loext:marker-style-name="T41"><text:span text:style-name="T41">2</text:span><text:span text:style-name="T41"/></text:p>
          </table:table-cell>
          <table:table-cell table:style-name="Tabla36.A2" office:value-type="string">
            <text:p text:style-name="P22" loext:marker-style-name="T41"><text:span text:style-name="T41">50%</text:span><text:span text:style-name="T41"/></text:p>
          </table:table-cell>
          <table:table-cell table:style-name="Tabla36.A2" office:value-type="string">
            <text:p text:style-name="P22" loext:marker-style-name="T41"><text:span text:style-name="T41">780</text:span><text:span text:style-name="T41"/></text:p>
          </table:table-cell>
          <table:table-cell table:style-name="Tabla36.A2" office:value-type="string">
            <text:p text:style-name="P22" loext:marker-style-name="T41"><text:span text:style-name="T41">780</text:span><text:span text:style-name="T41"/></text:p>
          </table:table-cell>
          <table:table-cell table:style-name="Tabla36.A2" office:value-type="string">
            <text:p text:style-name="P22" loext:marker-style-name="T41"><text:span text:style-name="T41">780</text:span><text:span text:style-name="T41"/></text:p>
          </table:table-cell>
        </table:table-row>
        <table:table-row table:style-name="Tabla36.2">
          <table:table-cell table:style-name="Tabla36.A2" office:value-type="string">
            <text:p text:style-name="P15" loext:marker-style-name="T41"><text:span text:style-name="T41">Plancha Plana (Estampado)</text:span><text:span text:style-name="T41"/></text:p>
          </table:table-cell>
          <table:table-cell table:style-name="Tabla36.A2" office:value-type="string">
            <text:p text:style-name="P23" loext:marker-style-name="T41"><text:span text:style-name="T41">150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300</text:span><text:span text:style-name="T41"/></text:p>
          </table:table-cell>
          <table:table-cell table:style-name="Tabla36.A2" office:value-type="string">
            <text:p text:style-name="P22" loext:marker-style-name="T41"><text:span text:style-name="T41">1500</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Pistola Etiquetadora Textil </text:span><text:span text:style-name="T41"/></text:p>
          </table:table-cell>
          <table:table-cell table:style-name="Tabla36.A2" office:value-type="string">
            <text:p text:style-name="P23" loext:marker-style-name="T41"><text:span text:style-name="T41">27</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7</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Muebles, Enseres </text:span><text:span text:style-name="T41"/></text:p>
          </table:table-cell>
          <table:table-cell table:style-name="Tabla36.A2" office:value-type="string">
            <text:p text:style-name="P23" loext:marker-style-name="T41"><text:span text:style-name="T41">554</text:span><text:span text:style-name="T41"/></text:p>
          </table:table-cell>
          <table:table-cell table:style-name="Tabla36.A2" office:value-type="string">
            <text:p text:style-name="P34" loext:marker-style-name="T41"/>
          </table:table-cell>
          <table:table-cell table:style-name="Tabla36.A2" office:value-type="string">
            <text:p text:style-name="P34" loext:marker-style-name="T41"/>
          </table:table-cell>
          <table:table-cell table:style-name="Tabla36.A2" office:value-type="string">
            <text:p text:style-name="P22" loext:marker-style-name="T41"><text:span text:style-name="T41">119.94</text:span><text:span text:style-name="T41"/></text:p>
          </table:table-cell>
          <table:table-cell table:style-name="Tabla36.A2" office:value-type="string">
            <text:p text:style-name="P34" loext:marker-style-name="T41"/>
          </table:table-cell>
          <table:table-cell table:style-name="Tabla36.A2" office:value-type="string">
            <text:p text:style-name="P22" loext:marker-style-name="T41"><text:span text:style-name="T41">14</text:span><text:span text:style-name="T41"/></text:p>
          </table:table-cell>
        </table:table-row>
        <table:table-row table:style-name="Tabla36.2">
          <table:table-cell table:style-name="Tabla36.A2" office:value-type="string">
            <text:p text:style-name="P15" loext:marker-style-name="T41"><text:span text:style-name="T41">Escritorio para computador</text:span><text:span text:style-name="T41"/></text:p>
          </table:table-cell>
          <table:table-cell table:style-name="Tabla36.A2" office:value-type="string">
            <text:p text:style-name="P23" loext:marker-style-name="T41"><text:span text:style-name="T41">13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26</text:span><text:span text:style-name="T41"/></text:p>
          </table:table-cell>
          <table:table-cell table:style-name="Tabla36.A2" office:value-type="string">
            <text:p text:style-name="P22" loext:marker-style-name="T41"><text:span text:style-name="T41">130</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Silla de escritorio</text:span><text:span text:style-name="T41"/></text:p>
          </table:table-cell>
          <table:table-cell table:style-name="Tabla36.A2" office:value-type="string">
            <text:p text:style-name="P23" loext:marker-style-name="T41"><text:span text:style-name="T41">50</text:span><text:span text:style-name="T41"/></text:p>
          </table:table-cell>
          <table:table-cell table:style-name="Tabla36.A2" office:value-type="string">
            <text:p text:style-name="P22" loext:marker-style-name="T41"><text:span text:style-name="T41">7</text:span><text:span text:style-name="T41"/></text:p>
          </table:table-cell>
          <table:table-cell table:style-name="Tabla36.A2" office:value-type="string">
            <text:p text:style-name="P22" loext:marker-style-name="T41"><text:span text:style-name="T41">14%</text:span><text:span text:style-name="T41"/></text:p>
          </table:table-cell>
          <table:table-cell table:style-name="Tabla36.A2" office:value-type="string">
            <text:p text:style-name="P22" loext:marker-style-name="T41"><text:span text:style-name="T41">7</text:span><text:span text:style-name="T41"/></text:p>
          </table:table-cell>
          <table:table-cell table:style-name="Tabla36.A2" office:value-type="string">
            <text:p text:style-name="P22" loext:marker-style-name="T41"><text:span text:style-name="T41">36</text:span><text:span text:style-name="T41"/></text:p>
          </table:table-cell>
          <table:table-cell table:style-name="Tabla36.A2" office:value-type="string">
            <text:p text:style-name="P22" loext:marker-style-name="T41"><text:span text:style-name="T41">14</text:span><text:span text:style-name="T41"/></text:p>
          </table:table-cell>
        </table:table-row>
        <table:table-row table:style-name="Tabla36.2">
          <table:table-cell table:style-name="Tabla36.A2" office:value-type="string">
            <text:p text:style-name="P15" loext:marker-style-name="T41"><text:span text:style-name="T41">Silla </text:span><text:span text:style-name="T41"/></text:p>
          </table:table-cell>
          <table:table-cell table:style-name="Tabla36.A2" office:value-type="string">
            <text:p text:style-name="P23" loext:marker-style-name="T41"><text:span text:style-name="T41">6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12</text:span><text:span text:style-name="T41"/></text:p>
          </table:table-cell>
          <table:table-cell table:style-name="Tabla36.A2" office:value-type="string">
            <text:p text:style-name="P22" loext:marker-style-name="T41"><text:span text:style-name="T41">60</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Exhibidor de polos </text:span><text:span text:style-name="T41"/></text:p>
          </table:table-cell>
          <table:table-cell table:style-name="Tabla36.A2" office:value-type="string">
            <text:p text:style-name="P23" loext:marker-style-name="T41"><text:span text:style-name="T41">22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44</text:span><text:span text:style-name="T41"/></text:p>
          </table:table-cell>
          <table:table-cell table:style-name="Tabla36.A2" office:value-type="string">
            <text:p text:style-name="P22" loext:marker-style-name="T41"><text:span text:style-name="T41">220</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Espejo para vestidor</text:span><text:span text:style-name="T41"/></text:p>
          </table:table-cell>
          <table:table-cell table:style-name="Tabla36.A2" office:value-type="string">
            <text:p text:style-name="P23" loext:marker-style-name="T41"><text:span text:style-name="T41">15</text:span><text:span text:style-name="T41"/></text:p>
          </table:table-cell>
          <table:table-cell table:style-name="Tabla36.A2" office:value-type="string">
            <text:p text:style-name="P22" loext:marker-style-name="T41"><text:span text:style-name="T41">1</text:span><text:span text:style-name="T41"/></text:p>
          </table:table-cell>
          <table:table-cell table:style-name="Tabla36.A2" office:value-type="string">
            <text:p text:style-name="P22" loext:marker-style-name="T41"><text:span text:style-name="T41">100%</text:span><text:span text:style-name="T41"/></text:p>
          </table:table-cell>
          <table:table-cell table:style-name="Tabla36.A2" office:value-type="string">
            <text:p text:style-name="P22" loext:marker-style-name="T41"><text:span text:style-name="T41">15</text:span><text:span text:style-name="T41"/></text:p>
          </table:table-cell>
          <table:table-cell table:style-name="Tabla36.A2" office:value-type="string">
            <text:p text:style-name="P22" loext:marker-style-name="T41"><text:span text:style-name="T41">15</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Probador vestidor de metal</text:span><text:span text:style-name="T41"/></text:p>
          </table:table-cell>
          <table:table-cell table:style-name="Tabla36.A2" office:value-type="string">
            <text:p text:style-name="P23" loext:marker-style-name="T41"><text:span text:style-name="T41">49</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10</text:span><text:span text:style-name="T41"/></text:p>
          </table:table-cell>
          <table:table-cell table:style-name="Tabla36.A2" office:value-type="string">
            <text:p text:style-name="P22" loext:marker-style-name="T41"><text:span text:style-name="T41">49</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Cortina de vestidor de polos</text:span><text:span text:style-name="T41"/></text:p>
          </table:table-cell>
          <table:table-cell table:style-name="Tabla36.A2" office:value-type="string">
            <text:p text:style-name="P23" loext:marker-style-name="T41"><text:span text:style-name="T41">30</text:span><text:span text:style-name="T41"/></text:p>
          </table:table-cell>
          <table:table-cell table:style-name="Tabla36.A2" office:value-type="string">
            <text:p text:style-name="P22" loext:marker-style-name="T41"><text:span text:style-name="T41">5</text:span><text:span text:style-name="T41"/></text:p>
          </table:table-cell>
          <table:table-cell table:style-name="Tabla36.A2" office:value-type="string">
            <text:p text:style-name="P22" loext:marker-style-name="T41"><text:span text:style-name="T41">20%</text:span><text:span text:style-name="T41"/></text:p>
          </table:table-cell>
          <table:table-cell table:style-name="Tabla36.A2" office:value-type="string">
            <text:p text:style-name="P22" loext:marker-style-name="T41"><text:span text:style-name="T41">6</text:span><text:span text:style-name="T41"/></text:p>
          </table:table-cell>
          <table:table-cell table:style-name="Tabla36.A2" office:value-type="string">
            <text:p text:style-name="P22" loext:marker-style-name="T41"><text:span text:style-name="T41">30</text:span><text:span text:style-name="T41"/></text:p>
          </table:table-cell>
          <table:table-cell table:style-name="Tabla36.A2" office:value-type="string">
            <text:p text:style-name="P22" loext:marker-style-name="T41"><text:span text:style-name="T41">-</text:span><text:span text:style-name="T41"/></text:p>
          </table:table-cell>
        </table:table-row>
        <table:table-row table:style-name="Tabla36.2">
          <table:table-cell table:style-name="Tabla36.A2" office:value-type="string">
            <text:p text:style-name="P15" loext:marker-style-name="T41"><text:span text:style-name="T41">Vehículos</text:span><text:span text:style-name="T41"/></text:p>
          </table:table-cell>
          <table:table-cell table:style-name="Tabla36.A2" office:value-type="string">
            <text:p text:style-name="P23" loext:marker-style-name="T41"><text:span text:style-name="T41">3400</text:span><text:span text:style-name="T41"/></text:p>
          </table:table-cell>
          <table:table-cell table:style-name="Tabla36.A2" office:value-type="string">
            <text:p text:style-name="P34" loext:marker-style-name="T41"/>
          </table:table-cell>
          <table:table-cell table:style-name="Tabla36.A2" office:value-type="string">
            <text:p text:style-name="P34" loext:marker-style-name="T41"/>
          </table:table-cell>
          <table:table-cell table:style-name="Tabla36.A2" office:value-type="string">
            <text:p text:style-name="P22" loext:marker-style-name="T41"><text:span text:style-name="T41">1133</text:span><text:span text:style-name="T41"/></text:p>
          </table:table-cell>
          <table:table-cell table:style-name="Tabla36.A2" office:value-type="string">
            <text:p text:style-name="P34" loext:marker-style-name="T41"/>
          </table:table-cell>
          <table:table-cell table:style-name="Tabla36.A2" office:value-type="string">
            <text:p text:style-name="P22" loext:marker-style-name="T41"><text:span text:style-name="T41">1133</text:span><text:span text:style-name="T41"/></text:p>
          </table:table-cell>
        </table:table-row>
        <table:table-row table:style-name="Tabla36.2">
          <table:table-cell table:style-name="Tabla36.A2" office:value-type="string">
            <text:p text:style-name="P15" loext:marker-style-name="T41"><text:span text:style-name="T41">Moto lineal(eléctrica)</text:span><text:span text:style-name="T41"/></text:p>
          </table:table-cell>
          <table:table-cell table:style-name="Tabla36.A2" office:value-type="string">
            <text:p text:style-name="P23" loext:marker-style-name="T41"><text:span text:style-name="T41">3400</text:span><text:span text:style-name="T41"/></text:p>
          </table:table-cell>
          <table:table-cell table:style-name="Tabla36.A2" office:value-type="string">
            <text:p text:style-name="P22" loext:marker-style-name="T41"><text:span text:style-name="T41">3</text:span><text:span text:style-name="T41"/></text:p>
          </table:table-cell>
          <table:table-cell table:style-name="Tabla36.A2" office:value-type="string">
            <text:p text:style-name="P22" loext:marker-style-name="T41"><text:span text:style-name="T41">33%</text:span><text:span text:style-name="T41"/></text:p>
          </table:table-cell>
          <table:table-cell table:style-name="Tabla36.A2" office:value-type="string">
            <text:p text:style-name="P22" loext:marker-style-name="T41"><text:span text:style-name="T41">1133</text:span><text:span text:style-name="T41"/></text:p>
          </table:table-cell>
          <table:table-cell table:style-name="Tabla36.A2" office:value-type="string">
            <text:p text:style-name="P22" loext:marker-style-name="T41"><text:span text:style-name="T41">2266.6</text:span><text:span text:style-name="T41"/></text:p>
          </table:table-cell>
          <table:table-cell table:style-name="Tabla36.A2" office:value-type="string">
            <text:p text:style-name="P22" loext:marker-style-name="T41"><text:span text:style-name="T41">1133</text:span><text:span text:style-name="T41"/></text:p>
          </table:table-cell>
        </table:table-row>
        <table:table-row table:style-name="Tabla36.17">
          <table:table-cell table:style-name="Tabla36.A17" office:value-type="string">
            <text:p text:style-name="P15" loext:marker-style-name="T41"><text:span text:style-name="T41">Total</text:span><text:span text:style-name="T41"/></text:p>
          </table:table-cell>
          <table:table-cell table:style-name="Tabla36.A17" office:value-type="string">
            <text:p text:style-name="P23" loext:marker-style-name="T41"><text:span text:style-name="T41">10838</text:span><text:span text:style-name="T41"/></text:p>
          </table:table-cell>
          <table:table-cell table:style-name="Tabla36.A17" office:value-type="string">
            <text:p text:style-name="P34" loext:marker-style-name="T41"/>
          </table:table-cell>
          <table:table-cell table:style-name="Tabla36.A17" office:value-type="string">
            <text:p text:style-name="P34" loext:marker-style-name="T41"/>
          </table:table-cell>
          <table:table-cell table:style-name="Tabla36.A17" office:value-type="string">
            <text:p text:style-name="P22" loext:marker-style-name="T41"><text:span text:style-name="T41">4237.18</text:span><text:span text:style-name="T41"/></text:p>
          </table:table-cell>
          <table:table-cell table:style-name="Tabla36.A17" office:value-type="string">
            <text:p text:style-name="P22" loext:marker-style-name="T41"><text:span text:style-name="T41">7011.8</text:span><text:span text:style-name="T41"/></text:p>
          </table:table-cell>
          <table:table-cell table:style-name="Tabla36.A17" office:value-type="string">
            <text:p text:style-name="P22" loext:marker-style-name="T41"><text:span text:style-name="T41">3826.12</text:span><text:span text:style-name="T41"/></text:p>
          </table:table-cell>
        </table:table-row>
      </table:table>
      <text:p text:style-name="P109" loext:marker-style-name="T4"><text:span text:style-name="T4">Nota: elaboración propia.</text:span><text:span text:style-name="T4"/></text:p>
      <text:p text:style-name="P134" loext:marker-style-name="T9"/>
      <text:h text:style-name="P72" text:outline-level="1" loext:marker-style-name="T4"><text:bookmark-start text:name="_Toc106699184"/><text:span text:style-name="T4">6. Capítulo VI. Presupuesto de ingresos y egresos</text:span><text:bookmark-end text:name="_Toc106699184"/><text:span text:style-name="T4"/></text:h>
      <text:h text:style-name="P81" text:outline-level="2" loext:marker-style-name="T4"><text:bookmark-start text:name="_Toc106699185"/><text:span text:style-name="T4">6.1. <text:s/>Presupuesto de ventas</text:span><text:bookmark-end text:name="_Toc106699185"/><text:span text:style-name="T4"/></text:h>
      <text:p text:style-name="P203" loext:marker-style-name="T14"><text:bookmark-start text:name="_Toc75271101"/><text:bookmark-start text:name="_Toc106698916"/><text:bookmark-start text:name="_Toc75271348"/><text:bookmark-start text:name="_Toc75271199"/><text:span text:style-name="T14">Tabla </text:span><text:bookmark-end text:name="_Toc75271101"/><text:bookmark-end text:name="_Toc106698916"/><text:bookmark-end text:name="_Toc75271348"/><text:bookmark-end text:name="_Toc75271199"/><text:span text:style-name="T14"><text:sequence text:ref-name="refTable17" text:name="Table" text:formula="ooow:Table+1" style:num-format="1">18</text:sequence></text:span><text:span text:style-name="T14"><text:s/></text:span></text:p>
      <text:p text:style-name="P202" loext:marker-style-name="T14"><text:span text:style-name="T41">Proyección de ventas en nuevos soles</text:span></text:p>
      <text:p text:style-name="P110" loext:marker-style-name="T75"><draw:frame draw:style-name="fr2" draw:name="Marco5" text:anchor-type="paragraph" svg:x="0.002cm" svg:y="0.787cm" svg:width="24.62cm" style:rel-width="100%" draw:z-index="59" loext:may-break-between-pages="true"><draw:text-box fo:min-height="0cm"><table:table table:name="Tabla38" table:style-name="Tabla38"><table:table-column table:style-name="Tabla38.A"/><table:table-column table:style-name="Tabla38.B"/><table:table-column table:style-name="Tabla38.C"/><table:table-column table:style-name="Tabla38.D"/><table:table-column table:style-name="Tabla38.C"/><table:table-column table:style-name="Tabla38.D"/><table:table-column table:style-name="Tabla38.C"/><table:table-column table:style-name="Tabla38.D"/><table:table-column table:style-name="Tabla38.C"/><table:table-column table:style-name="Tabla38.J"/><table:table-column table:style-name="Tabla38.K"/><table:table-column table:style-name="Tabla38.J"/><table:table-column table:style-name="Tabla38.M"/><table:table-column table:style-name="Tabla38.N"/><table:table-column table:style-name="Tabla38.O"/><table:table-column table:style-name="Tabla38.P"/><table:table-column table:style-name="Tabla38.Q"/><table:table-column table:style-name="Tabla38.R"/><table:table-column table:style-name="Tabla38.Q"/><table:table-column table:style-name="Tabla38.T"/><table:table-column table:style-name="Tabla38.U"/><table:table-row table:style-name="Tabla38.1"><table:table-cell table:style-name="Tabla38.A1" office:value-type="string"><text:p text:style-name="P13" loext:marker-style-name="T41"><text:span text:style-name="T41">Año</text:span></text:p></table:table-cell><table:table-cell table:style-name="Tabla38.A1" office:value-type="string"><text:p text:style-name="P13" loext:marker-style-name="T41"><text:span text:style-name="T41">Valor Unitario</text:span></text:p></table:table-cell><table:table-cell table:style-name="Tabla38.A1" office:value-type="string"><text:p text:style-name="P13" loext:marker-style-name="T41"><text:span text:style-name="T41">Mes 1</text:span></text:p></table:table-cell><table:table-cell table:style-name="Tabla38.A1" office:value-type="string"><text:p text:style-name="P13" loext:marker-style-name="T41"><text:span text:style-name="T41">Mes 2</text:span></text:p></table:table-cell><table:table-cell table:style-name="Tabla38.A1" office:value-type="string"><text:p text:style-name="P13" loext:marker-style-name="T41"><text:span text:style-name="T41">Mes 3</text:span></text:p></table:table-cell><table:table-cell table:style-name="Tabla38.A1" office:value-type="string"><text:p text:style-name="P13" loext:marker-style-name="T41"><text:span text:style-name="T41">Mes 4</text:span></text:p></table:table-cell><table:table-cell table:style-name="Tabla38.A1" office:value-type="string"><text:p text:style-name="P13" loext:marker-style-name="T41"><text:span text:style-name="T41">Mes 5</text:span></text:p></table:table-cell><table:table-cell table:style-name="Tabla38.A1" office:value-type="string"><text:p text:style-name="P13" loext:marker-style-name="T41"><text:span text:style-name="T41">Mes 6</text:span></text:p></table:table-cell><table:table-cell table:style-name="Tabla38.A1" office:value-type="string"><text:p text:style-name="P13" loext:marker-style-name="T41"><text:span text:style-name="T41">Mes 7</text:span></text:p></table:table-cell><table:table-cell table:style-name="Tabla38.A1" table:number-columns-spanned="2" office:value-type="string"><text:p text:style-name="P13" loext:marker-style-name="T41"><text:span text:style-name="T41">Mes 8</text:span></text:p></table:table-cell><table:covered-table-cell/><table:table-cell table:style-name="Tabla38.A1" table:number-columns-spanned="2" office:value-type="string"><text:p text:style-name="P13" loext:marker-style-name="T41"><text:span text:style-name="T41">Mes 9</text:span></text:p></table:table-cell><table:covered-table-cell/><table:table-cell table:style-name="Tabla38.A1" table:number-columns-spanned="2" office:value-type="string"><text:p text:style-name="P13" loext:marker-style-name="T41"><text:span text:style-name="T41">Mes 10</text:span></text:p></table:table-cell><table:covered-table-cell/><table:table-cell table:style-name="Tabla38.A1" table:number-columns-spanned="2" office:value-type="string"><text:p text:style-name="P13" loext:marker-style-name="T41"><text:span text:style-name="T41">Mes 11</text:span></text:p></table:table-cell><table:covered-table-cell/><table:table-cell table:style-name="Tabla38.A1" table:number-columns-spanned="2" office:value-type="string"><text:p text:style-name="P13" loext:marker-style-name="T41"><text:span text:style-name="T41">Mes 12</text:span></text:p></table:table-cell><table:covered-table-cell/><table:table-cell table:style-name="Tabla38.A1" table:number-columns-spanned="2" office:value-type="string"><text:p text:style-name="P13" loext:marker-style-name="T41"><text:span text:style-name="T41">TOTAL</text:span></text:p></table:table-cell><table:covered-table-cell/></table:table-row><table:table-row table:style-name="Tabla38.2"><table:table-cell table:style-name="Tabla38.A2" office:value-type="string"><text:p text:style-name="P13" loext:marker-style-name="T41"><text:span text:style-name="T41">1</text:span></text:p></table:table-cell><table:table-cell table:style-name="Tabla38.A2" office:value-type="string"><text:p text:style-name="P13" loext:marker-style-name="T41"><text:span text:style-name="T41">45</text:span></text:p></table:table-cell><table:table-cell table:style-name="Tabla38.A2" office:value-type="string"><text:p text:style-name="P13" loext:marker-style-name="T41"><text:span text:style-name="T41">13500</text:span></text:p></table:table-cell><table:table-cell table:style-name="Tabla38.A2" office:value-type="string"><text:p text:style-name="P13" loext:marker-style-name="T41"><text:span text:style-name="T41">15030</text:span></text:p></table:table-cell><table:table-cell table:style-name="Tabla38.A2" office:value-type="string"><text:p text:style-name="P13" loext:marker-style-name="T41"><text:span text:style-name="T41">15255</text:span></text:p></table:table-cell><table:table-cell table:style-name="Tabla38.A2" office:value-type="string"><text:p text:style-name="P13" loext:marker-style-name="T41"><text:span text:style-name="T41">15345</text:span></text:p></table:table-cell><table:table-cell table:style-name="Tabla38.A2" office:value-type="string"><text:p text:style-name="P13" loext:marker-style-name="T41"><text:span text:style-name="T41">15930</text:span></text:p></table:table-cell><table:table-cell table:style-name="Tabla38.A2" office:value-type="string"><text:p text:style-name="P13" loext:marker-style-name="T41"><text:span text:style-name="T41">19935</text:span></text:p></table:table-cell><table:table-cell table:style-name="Tabla38.A2" office:value-type="string"><text:p text:style-name="P13" loext:marker-style-name="T41"><text:span text:style-name="T41">16380</text:span></text:p></table:table-cell><table:table-cell table:style-name="Tabla38.A2" table:number-columns-spanned="2" office:value-type="string"><text:p text:style-name="P13" loext:marker-style-name="T41"><text:span text:style-name="T41">18630</text:span></text:p></table:table-cell><table:covered-table-cell/><table:table-cell table:style-name="Tabla38.A2" table:number-columns-spanned="2" office:value-type="string"><text:p text:style-name="P13" loext:marker-style-name="T41"><text:span text:style-name="T41">14130</text:span></text:p></table:table-cell><table:covered-table-cell/><table:table-cell table:style-name="Tabla38.A2" table:number-columns-spanned="2" office:value-type="string"><text:p text:style-name="P13" loext:marker-style-name="T41"><text:span text:style-name="T41">19980</text:span></text:p></table:table-cell><table:covered-table-cell/><table:table-cell table:style-name="Tabla38.A2" table:number-columns-spanned="2" office:value-type="string"><text:p text:style-name="P13" loext:marker-style-name="T41"><text:span text:style-name="T41">17280</text:span></text:p></table:table-cell><table:covered-table-cell/><table:table-cell table:style-name="Tabla38.A2" table:number-columns-spanned="2" office:value-type="string"><text:p text:style-name="P13" loext:marker-style-name="T41"><text:span text:style-name="T41">15165</text:span></text:p></table:table-cell><table:covered-table-cell/><table:table-cell table:style-name="Tabla38.A2" table:number-columns-spanned="2" office:value-type="string"><text:p text:style-name="P13" loext:marker-style-name="T41"><text:span text:style-name="T41">196560</text:span></text:p></table:table-cell><table:covered-table-cell/></table:table-row><table:table-row table:style-name="Tabla38.2"><table:table-cell table:style-name="Tabla38.A2" office:value-type="string"><text:p text:style-name="P13" loext:marker-style-name="T41"><text:span text:style-name="T41">2</text:span></text:p></table:table-cell><table:table-cell table:style-name="Tabla38.A2" office:value-type="string"><text:p text:style-name="P13" loext:marker-style-name="T41"><text:span text:style-name="T41">45</text:span></text:p></table:table-cell><table:table-cell table:style-name="Tabla38.A2" office:value-type="string"><text:p text:style-name="P13" loext:marker-style-name="T41"><text:span text:style-name="T41">17973</text:span></text:p></table:table-cell><table:table-cell table:style-name="Tabla38.A2" office:value-type="string"><text:p text:style-name="P13" loext:marker-style-name="T41"><text:span text:style-name="T41">18219</text:span></text:p></table:table-cell><table:table-cell table:style-name="Tabla38.A2" office:value-type="string"><text:p text:style-name="P13" loext:marker-style-name="T41"><text:span text:style-name="T41">18464</text:span></text:p></table:table-cell><table:table-cell table:style-name="Tabla38.A2" office:value-type="string"><text:p text:style-name="P13" loext:marker-style-name="T41"><text:span text:style-name="T41">18709</text:span></text:p></table:table-cell><table:table-cell table:style-name="Tabla38.A2" office:value-type="string"><text:p text:style-name="P13" loext:marker-style-name="T41"><text:span text:style-name="T41">18954</text:span></text:p></table:table-cell><table:table-cell table:style-name="Tabla38.A2" office:value-type="string"><text:p text:style-name="P13" loext:marker-style-name="T41"><text:span text:style-name="T41">19199</text:span></text:p></table:table-cell><table:table-cell table:style-name="Tabla38.A2" office:value-type="string"><text:p text:style-name="P13" loext:marker-style-name="T41"><text:span text:style-name="T41">19444</text:span></text:p></table:table-cell><table:table-cell table:style-name="Tabla38.A2" table:number-columns-spanned="2" office:value-type="string"><text:p text:style-name="P13" loext:marker-style-name="T41"><text:span text:style-name="T41">19689</text:span></text:p></table:table-cell><table:covered-table-cell/><table:table-cell table:style-name="Tabla38.A2" table:number-columns-spanned="2" office:value-type="string"><text:p text:style-name="P13" loext:marker-style-name="T41"><text:span text:style-name="T41">19935</text:span></text:p></table:table-cell><table:covered-table-cell/><table:table-cell table:style-name="Tabla38.A2" table:number-columns-spanned="2" office:value-type="string"><text:p text:style-name="P13" loext:marker-style-name="T41"><text:span text:style-name="T41">20180</text:span></text:p></table:table-cell><table:covered-table-cell/><table:table-cell table:style-name="Tabla38.A2" table:number-columns-spanned="2" office:value-type="string"><text:p text:style-name="P13" loext:marker-style-name="T41"><text:span text:style-name="T41">20425</text:span></text:p></table:table-cell><table:covered-table-cell/><table:table-cell table:style-name="Tabla38.A2" table:number-columns-spanned="2" office:value-type="string"><text:p text:style-name="P13" loext:marker-style-name="T41"><text:span text:style-name="T41">20670</text:span></text:p></table:table-cell><table:covered-table-cell/><table:table-cell table:style-name="Tabla38.A2" table:number-columns-spanned="2" office:value-type="string"><text:p text:style-name="P13" loext:marker-style-name="T41"><text:span text:style-name="T41">231860</text:span></text:p></table:table-cell><table:covered-table-cell/></table:table-row><table:table-row table:style-name="Tabla38.2"><table:table-cell table:style-name="Tabla38.A2" office:value-type="string"><text:p text:style-name="P13" loext:marker-style-name="T41"><text:span text:style-name="T41">3</text:span></text:p></table:table-cell><table:table-cell table:style-name="Tabla38.A2" office:value-type="string"><text:p text:style-name="P13" loext:marker-style-name="T41"><text:span text:style-name="T41">45</text:span></text:p></table:table-cell><table:table-cell table:style-name="Tabla38.A2" office:value-type="string"><text:p text:style-name="P13" loext:marker-style-name="T41"><text:span text:style-name="T41">20915</text:span></text:p></table:table-cell><table:table-cell table:style-name="Tabla38.A2" office:value-type="string"><text:p text:style-name="P13" loext:marker-style-name="T41"><text:span text:style-name="T41">21160</text:span></text:p></table:table-cell><table:table-cell table:style-name="Tabla38.A2" office:value-type="string"><text:p text:style-name="P13" loext:marker-style-name="T41"><text:span text:style-name="T41">21405</text:span></text:p></table:table-cell><table:table-cell table:style-name="Tabla38.A2" office:value-type="string"><text:p text:style-name="P13" loext:marker-style-name="T41"><text:span text:style-name="T41">21651</text:span></text:p></table:table-cell><table:table-cell table:style-name="Tabla38.A2" office:value-type="string"><text:p text:style-name="P13" loext:marker-style-name="T41"><text:span text:style-name="T41">21896</text:span></text:p></table:table-cell><table:table-cell table:style-name="Tabla38.A2" office:value-type="string"><text:p text:style-name="P13" loext:marker-style-name="T41"><text:span text:style-name="T41">22141</text:span></text:p></table:table-cell><table:table-cell table:style-name="Tabla38.A2" office:value-type="string"><text:p text:style-name="P13" loext:marker-style-name="T41"><text:span text:style-name="T41">22386</text:span></text:p></table:table-cell><table:table-cell table:style-name="Tabla38.A2" table:number-columns-spanned="2" office:value-type="string"><text:p text:style-name="P13" loext:marker-style-name="T41"><text:span text:style-name="T41">22631</text:span></text:p></table:table-cell><table:covered-table-cell/><table:table-cell table:style-name="Tabla38.A2" table:number-columns-spanned="2" office:value-type="string"><text:p text:style-name="P13" loext:marker-style-name="T41"><text:span text:style-name="T41">22876</text:span></text:p></table:table-cell><table:covered-table-cell/><table:table-cell table:style-name="Tabla38.A2" table:number-columns-spanned="2" office:value-type="string"><text:p text:style-name="P13" loext:marker-style-name="T41"><text:span text:style-name="T41">23121</text:span></text:p></table:table-cell><table:covered-table-cell/><table:table-cell table:style-name="Tabla38.A2" table:number-columns-spanned="2" office:value-type="string"><text:p text:style-name="P13" loext:marker-style-name="T41"><text:span text:style-name="T41">23366</text:span></text:p></table:table-cell><table:covered-table-cell/><table:table-cell table:style-name="Tabla38.A2" table:number-columns-spanned="2" office:value-type="string"><text:p text:style-name="P13" loext:marker-style-name="T41"><text:span text:style-name="T41">23612</text:span></text:p></table:table-cell><table:covered-table-cell/><table:table-cell table:style-name="Tabla38.A2" table:number-columns-spanned="2" office:value-type="string"><text:p text:style-name="P13" loext:marker-style-name="T41"><text:span text:style-name="T41">267160</text:span></text:p></table:table-cell><table:covered-table-cell/></table:table-row><table:table-row table:style-name="Tabla38.2"><table:table-cell table:style-name="Tabla38.A2" office:value-type="string"><text:p text:style-name="P13" loext:marker-style-name="T41"><text:span text:style-name="T41">4</text:span></text:p></table:table-cell><table:table-cell table:style-name="Tabla38.A2" office:value-type="string"><text:p text:style-name="P13" loext:marker-style-name="T41"><text:span text:style-name="T41">45</text:span></text:p></table:table-cell><table:table-cell table:style-name="Tabla38.A2" office:value-type="string"><text:p text:style-name="P13" loext:marker-style-name="T41"><text:span text:style-name="T41">23857</text:span></text:p></table:table-cell><table:table-cell table:style-name="Tabla38.A2" office:value-type="string"><text:p text:style-name="P13" loext:marker-style-name="T41"><text:span text:style-name="T41">24102</text:span></text:p></table:table-cell><table:table-cell table:style-name="Tabla38.A2" office:value-type="string"><text:p text:style-name="P13" loext:marker-style-name="T41"><text:span text:style-name="T41">24347</text:span></text:p></table:table-cell><table:table-cell table:style-name="Tabla38.A2" office:value-type="string"><text:p text:style-name="P13" loext:marker-style-name="T41"><text:span text:style-name="T41">24592</text:span></text:p></table:table-cell><table:table-cell table:style-name="Tabla38.A2" office:value-type="string"><text:p text:style-name="P13" loext:marker-style-name="T41"><text:span text:style-name="T41">24837</text:span></text:p></table:table-cell><table:table-cell table:style-name="Tabla38.A2" office:value-type="string"><text:p text:style-name="P13" loext:marker-style-name="T41"><text:span text:style-name="T41">25082</text:span></text:p></table:table-cell><table:table-cell table:style-name="Tabla38.A2" office:value-type="string"><text:p text:style-name="P13" loext:marker-style-name="T41"><text:span text:style-name="T41">25328</text:span></text:p></table:table-cell><table:table-cell table:style-name="Tabla38.A2" table:number-columns-spanned="2" office:value-type="string"><text:p text:style-name="P13" loext:marker-style-name="T41"><text:span text:style-name="T41">25573</text:span></text:p></table:table-cell><table:covered-table-cell/><table:table-cell table:style-name="Tabla38.A2" table:number-columns-spanned="2" office:value-type="string"><text:p text:style-name="P13" loext:marker-style-name="T41"><text:span text:style-name="T41">25818</text:span></text:p></table:table-cell><table:covered-table-cell/><table:table-cell table:style-name="Tabla38.A2" table:number-columns-spanned="2" office:value-type="string"><text:p text:style-name="P13" loext:marker-style-name="T41"><text:span text:style-name="T41">26063</text:span></text:p></table:table-cell><table:covered-table-cell/><table:table-cell table:style-name="Tabla38.A2" table:number-columns-spanned="2" office:value-type="string"><text:p text:style-name="P13" loext:marker-style-name="T41"><text:span text:style-name="T41">26308</text:span></text:p></table:table-cell><table:covered-table-cell/><table:table-cell table:style-name="Tabla38.A2" table:number-columns-spanned="2" office:value-type="string"><text:p text:style-name="P13" loext:marker-style-name="T41"><text:span text:style-name="T41">26553</text:span></text:p></table:table-cell><table:covered-table-cell/><table:table-cell table:style-name="Tabla38.A2" table:number-columns-spanned="2" office:value-type="string"><text:p text:style-name="P13" loext:marker-style-name="T41"><text:span text:style-name="T41">302460</text:span></text:p></table:table-cell><table:covered-table-cell/></table:table-row><table:table-row table:style-name="Tabla38.2"><table:table-cell table:style-name="Tabla38.A2" office:value-type="string"><text:p text:style-name="P13" loext:marker-style-name="T41"><text:span text:style-name="T41">5</text:span></text:p></table:table-cell><table:table-cell table:style-name="Tabla38.A2" office:value-type="string"><text:p text:style-name="P13" loext:marker-style-name="T41"><text:span text:style-name="T41">45</text:span></text:p></table:table-cell><table:table-cell table:style-name="Tabla38.A2" office:value-type="string"><text:p text:style-name="P13" loext:marker-style-name="T41"><text:span text:style-name="T41">26798</text:span></text:p></table:table-cell><table:table-cell table:style-name="Tabla38.A2" office:value-type="string"><text:p text:style-name="P13" loext:marker-style-name="T41"><text:span text:style-name="T41">27044</text:span></text:p></table:table-cell><table:table-cell table:style-name="Tabla38.A2" office:value-type="string"><text:p text:style-name="P13" loext:marker-style-name="T41"><text:span text:style-name="T41">27289</text:span></text:p></table:table-cell><table:table-cell table:style-name="Tabla38.A2" office:value-type="string"><text:p text:style-name="P13" loext:marker-style-name="T41"><text:span text:style-name="T41">27534</text:span></text:p></table:table-cell><table:table-cell table:style-name="Tabla38.A2" office:value-type="string"><text:p text:style-name="P13" loext:marker-style-name="T41"><text:span text:style-name="T41">27779</text:span></text:p></table:table-cell><table:table-cell table:style-name="Tabla38.A2" office:value-type="string"><text:p text:style-name="P13" loext:marker-style-name="T41"><text:span text:style-name="T41">28024</text:span></text:p></table:table-cell><table:table-cell table:style-name="Tabla38.A2" office:value-type="string"><text:p text:style-name="P13" loext:marker-style-name="T41"><text:span text:style-name="T41">28269</text:span></text:p></table:table-cell><table:table-cell table:style-name="Tabla38.A2" table:number-columns-spanned="2" office:value-type="string"><text:p text:style-name="P13" loext:marker-style-name="T41"><text:span text:style-name="T41">28514</text:span></text:p></table:table-cell><table:covered-table-cell/><table:table-cell table:style-name="Tabla38.A2" table:number-columns-spanned="2" office:value-type="string"><text:p text:style-name="P13" loext:marker-style-name="T41"><text:span text:style-name="T41">28760</text:span></text:p></table:table-cell><table:covered-table-cell/><table:table-cell table:style-name="Tabla38.A2" table:number-columns-spanned="2" office:value-type="string"><text:p text:style-name="P13" loext:marker-style-name="T41"><text:span text:style-name="T41">29005</text:span></text:p></table:table-cell><table:covered-table-cell/><table:table-cell table:style-name="Tabla38.A2" table:number-columns-spanned="2" office:value-type="string"><text:p text:style-name="P13" loext:marker-style-name="T41"><text:span text:style-name="T41">29250</text:span></text:p></table:table-cell><table:covered-table-cell/><table:table-cell table:style-name="Tabla38.A2" table:number-columns-spanned="2" office:value-type="string"><text:p text:style-name="P13" loext:marker-style-name="T41"><text:span text:style-name="T41">29495</text:span></text:p></table:table-cell><table:covered-table-cell/><table:table-cell table:style-name="Tabla38.A2" table:number-columns-spanned="2" office:value-type="string"><text:p text:style-name="P13" loext:marker-style-name="T41"><text:span text:style-name="T41">337761</text:span></text:p></table:table-cell><table:covered-table-cell/></table:table-row><table:table-row table:style-name="Tabla38.7"><table:table-cell table:style-name="Tabla38.A7" table:number-columns-spanned="10" office:value-type="string"><text:p text:style-name="P35" loext:marker-style-name="T41"/></table:table-cell><table:covered-table-cell/><table:covered-table-cell/><table:covered-table-cell/><table:covered-table-cell/><table:covered-table-cell/><table:covered-table-cell/><table:covered-table-cell/><table:covered-table-cell/><table:covered-table-cell/><table:table-cell table:style-name="Tabla38.A7" table:number-columns-spanned="2" office:value-type="string"><text:p text:style-name="P35" loext:marker-style-name="T41"/></table:table-cell><table:covered-table-cell/><table:table-cell table:style-name="Tabla38.A7" table:number-columns-spanned="2" office:value-type="string"><text:p text:style-name="P35" loext:marker-style-name="T41"/></table:table-cell><table:covered-table-cell/><table:table-cell table:style-name="Tabla38.A7" table:number-columns-spanned="2" office:value-type="string"><text:p text:style-name="P35" loext:marker-style-name="T41"/></table:table-cell><table:covered-table-cell/><table:table-cell table:style-name="Tabla38.A7" table:number-columns-spanned="2" office:value-type="string"><text:p text:style-name="P35" loext:marker-style-name="T41"/></table:table-cell><table:covered-table-cell/><table:table-cell table:style-name="Tabla38.A7" table:number-columns-spanned="2" office:value-type="string"><text:p text:style-name="P35" loext:marker-style-name="T41"/></table:table-cell><table:covered-table-cell/><table:table-cell table:style-name="Tabla38.A7" office:value-type="string"><text:p text:style-name="P35" loext:marker-style-name="T41"/></table:table-cell></table:table-row></table:table></draw:text-box></draw:frame></text:p>
      <text:p text:style-name="P109" loext:marker-style-name="T4"><text:span text:style-name="T4">Nota: la proyección es en términos reales o contantes (valor del producto no varía o no hay inflación)</text:span><text:span text:style-name="T4"/></text:p>
      <text:p text:style-name="P111" loext:marker-style-name="T4"/>
      <text:h text:style-name="P78" text:outline-level="2" loext:marker-style-name="T4"><text:bookmark-start text:name="_Toc106699186"/><text:span text:style-name="T4">6.2. <text:s/>Presupuesto de costos y gasto</text:span><text:bookmark-end text:name="_Toc106699186"/><text:span text:style-name="T4"/></text:h>
      <text:p text:style-name="P202" loext:marker-style-name="T14"><text:bookmark-start text:name="_Toc75271102"/><text:bookmark-start text:name="_Toc106698917"/><text:bookmark-start text:name="_Toc75271349"/><text:bookmark-start text:name="_Toc75271200"/><text:span text:style-name="T14">Tabla </text:span><text:bookmark-end text:name="_Toc75271102"/><text:bookmark-end text:name="_Toc106698917"/><text:bookmark-end text:name="_Toc75271349"/><text:bookmark-end text:name="_Toc75271200"/><text:span text:style-name="T14"><text:sequence text:ref-name="refTable18" text:name="Table" text:formula="ooow:Table+1" style:num-format="1">19</text:sequence></text:span><text:span text:style-name="T14"><text:s/></text:span></text:p>
      <text:p text:style-name="P202" loext:marker-style-name="T4"><text:span text:style-name="T4">Proyección de costos en nuevos soles</text:span><text:span text:style-name="T4"/></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number-columns-repeated="3"/>
        <table:table-column table:style-name="Tabla39.J"/>
        <table:table-column table:style-name="Tabla39.G" table:number-columns-repeated="2"/>
        <table:table-column table:style-name="Tabla39.M"/>
        <table:table-column table:style-name="Tabla39.N"/>
        <table:table-column table:style-name="Tabla39.O"/>
        <table:table-column table:style-name="Tabla39.P"/>
        <text:soft-page-break/>
        <table:table-row table:style-name="Tabla39.1">
          <table:table-cell table:style-name="Tabla39.A1" office:value-type="string">
            <text:p text:style-name="P3" loext:marker-style-name="T41"><text:span text:style-name="T41">Año</text:span><text:span text:style-name="T41"/></text:p>
          </table:table-cell>
          <table:table-cell table:style-name="Tabla39.A1" table:number-columns-spanned="2" office:value-type="string">
            <text:p text:style-name="P3" loext:marker-style-name="T41"><text:span text:style-name="T41">Valor Unitario</text:span><text:span text:style-name="T41"/></text:p>
          </table:table-cell>
          <table:covered-table-cell/>
          <table:table-cell table:style-name="Tabla39.A1" office:value-type="string">
            <text:p text:style-name="P3" loext:marker-style-name="T41"><text:span text:style-name="T41">Mes 1</text:span><text:span text:style-name="T41"/></text:p>
          </table:table-cell>
          <table:table-cell table:style-name="Tabla39.A1" office:value-type="string">
            <text:p text:style-name="P3" loext:marker-style-name="T41"><text:span text:style-name="T41">Mes 2</text:span><text:span text:style-name="T41"/></text:p>
          </table:table-cell>
          <table:table-cell table:style-name="Tabla39.A1" office:value-type="string">
            <text:p text:style-name="P3" loext:marker-style-name="T41"><text:span text:style-name="T41">Mes 3</text:span><text:span text:style-name="T41"/></text:p>
          </table:table-cell>
          <table:table-cell table:style-name="Tabla39.A1" office:value-type="string">
            <text:p text:style-name="P3" loext:marker-style-name="T41"><text:span text:style-name="T41">Mes 4</text:span><text:span text:style-name="T41"/></text:p>
          </table:table-cell>
          <table:table-cell table:style-name="Tabla39.A1" office:value-type="string">
            <text:p text:style-name="P3" loext:marker-style-name="T41"><text:span text:style-name="T41">Mes 5</text:span><text:span text:style-name="T41"/></text:p>
          </table:table-cell>
          <table:table-cell table:style-name="Tabla39.A1" office:value-type="string">
            <text:p text:style-name="P3" loext:marker-style-name="T41"><text:span text:style-name="T41">Mes 6</text:span><text:span text:style-name="T41"/></text:p>
          </table:table-cell>
          <table:table-cell table:style-name="Tabla39.A1" office:value-type="string">
            <text:p text:style-name="P3" loext:marker-style-name="T41"><text:span text:style-name="T41">Mes 7</text:span><text:span text:style-name="T41"/></text:p>
          </table:table-cell>
          <table:table-cell table:style-name="Tabla39.A1" office:value-type="string">
            <text:p text:style-name="P3" loext:marker-style-name="T41"><text:span text:style-name="T41">Mes 8</text:span><text:span text:style-name="T41"/></text:p>
          </table:table-cell>
          <table:table-cell table:style-name="Tabla39.A1" office:value-type="string">
            <text:p text:style-name="P3" loext:marker-style-name="T41"><text:span text:style-name="T41">Mes 9</text:span><text:span text:style-name="T41"/></text:p>
          </table:table-cell>
          <table:table-cell table:style-name="Tabla39.A1" office:value-type="string">
            <text:p text:style-name="P3" loext:marker-style-name="T41"><text:span text:style-name="T41">Mes 10</text:span><text:span text:style-name="T41"/></text:p>
          </table:table-cell>
          <table:table-cell table:style-name="Tabla39.A1" office:value-type="string">
            <text:p text:style-name="P3" loext:marker-style-name="T41"><text:span text:style-name="T41">Mes 11</text:span><text:span text:style-name="T41"/></text:p>
          </table:table-cell>
          <table:table-cell table:style-name="Tabla39.A1" office:value-type="string">
            <text:p text:style-name="P3" loext:marker-style-name="T41"><text:span text:style-name="T41">Mes 12</text:span><text:span text:style-name="T41"/></text:p>
          </table:table-cell>
          <table:table-cell table:style-name="Tabla39.A1" office:value-type="string">
            <text:p text:style-name="P3" loext:marker-style-name="T42"><text:span text:style-name="T42">TOTAL</text:span><text:span text:style-name="T42"/></text:p>
          </table:table-cell>
        </table:table-row>
        <table:table-row table:style-name="Tabla39.2">
          <table:table-cell table:style-name="Tabla39.A2" table:number-columns-spanned="2" office:value-type="string">
            <text:p text:style-name="P3" loext:marker-style-name="T41"><text:span text:style-name="T41">1</text:span><text:span text:style-name="T41"/></text:p>
          </table:table-cell>
          <table:covered-table-cell/>
          <table:table-cell table:style-name="Tabla39.A2" office:value-type="string">
            <text:p text:style-name="P3" loext:marker-style-name="T41"><text:span text:style-name="T41">39</text:span><text:span text:style-name="T41"/></text:p>
          </table:table-cell>
          <table:table-cell table:style-name="Tabla39.A2" office:value-type="string">
            <text:p text:style-name="P3" loext:marker-style-name="T41"><text:span text:style-name="T41">11802</text:span><text:span text:style-name="T41"/></text:p>
          </table:table-cell>
          <table:table-cell table:style-name="Tabla39.A2" office:value-type="string">
            <text:p text:style-name="P3" loext:marker-style-name="T41"><text:span text:style-name="T41">13140</text:span><text:span text:style-name="T41"/></text:p>
          </table:table-cell>
          <table:table-cell table:style-name="Tabla39.A2" office:value-type="string">
            <text:p text:style-name="P3" loext:marker-style-name="T41"><text:span text:style-name="T41">13336</text:span><text:span text:style-name="T41"/></text:p>
          </table:table-cell>
          <table:table-cell table:style-name="Tabla39.A2" office:value-type="string">
            <text:p text:style-name="P3" loext:marker-style-name="T41"><text:span text:style-name="T41">13415</text:span><text:span text:style-name="T41"/></text:p>
          </table:table-cell>
          <table:table-cell table:style-name="Tabla39.A2" office:value-type="string">
            <text:p text:style-name="P3" loext:marker-style-name="T41"><text:span text:style-name="T41">13926</text:span><text:span text:style-name="T41"/></text:p>
          </table:table-cell>
          <table:table-cell table:style-name="Tabla39.A2" office:value-type="string">
            <text:p text:style-name="P3" loext:marker-style-name="T41"><text:span text:style-name="T41">17428</text:span><text:span text:style-name="T41"/></text:p>
          </table:table-cell>
          <table:table-cell table:style-name="Tabla39.A2" office:value-type="string">
            <text:p text:style-name="P3" loext:marker-style-name="T41"><text:span text:style-name="T41">14320</text:span><text:span text:style-name="T41"/></text:p>
          </table:table-cell>
          <table:table-cell table:style-name="Tabla39.A2" office:value-type="string">
            <text:p text:style-name="P3" loext:marker-style-name="T41"><text:span text:style-name="T41">16287</text:span><text:span text:style-name="T41"/></text:p>
          </table:table-cell>
          <table:table-cell table:style-name="Tabla39.A2" office:value-type="string">
            <text:p text:style-name="P3" loext:marker-style-name="T41"><text:span text:style-name="T41">12353</text:span><text:span text:style-name="T41"/></text:p>
          </table:table-cell>
          <table:table-cell table:style-name="Tabla39.A2" office:value-type="string">
            <text:p text:style-name="P3" loext:marker-style-name="T41"><text:span text:style-name="T41">17467</text:span><text:span text:style-name="T41"/></text:p>
          </table:table-cell>
          <table:table-cell table:style-name="Tabla39.A2" office:value-type="string">
            <text:p text:style-name="P3" loext:marker-style-name="T41"><text:span text:style-name="T41">15107</text:span><text:span text:style-name="T41"/></text:p>
          </table:table-cell>
          <table:table-cell table:style-name="Tabla39.A2" office:value-type="string">
            <text:p text:style-name="P3" loext:marker-style-name="T42"><text:span text:style-name="T42">13258</text:span><text:span text:style-name="T42"/></text:p>
          </table:table-cell>
          <table:table-cell table:style-name="Tabla39.A2" office:value-type="string">
            <text:p text:style-name="P3" loext:marker-style-name="T42"><text:span text:style-name="T42">171839</text:span><text:span text:style-name="T42"/></text:p>
          </table:table-cell>
        </table:table-row>
        <table:table-row table:style-name="Tabla39.2">
          <table:table-cell table:style-name="Tabla39.A2" table:number-columns-spanned="2" office:value-type="string">
            <text:p text:style-name="P3" loext:marker-style-name="T41"><text:span text:style-name="T41">2</text:span><text:span text:style-name="T41"/></text:p>
          </table:table-cell>
          <table:covered-table-cell/>
          <table:table-cell table:style-name="Tabla39.A2" office:value-type="string">
            <text:p text:style-name="P3" loext:marker-style-name="T41"><text:span text:style-name="T41">39</text:span><text:span text:style-name="T41"/></text:p>
          </table:table-cell>
          <table:table-cell table:style-name="Tabla39.A2" office:value-type="string">
            <text:p text:style-name="P3" loext:marker-style-name="T41"><text:span text:style-name="T41">18293</text:span><text:span text:style-name="T41"/></text:p>
          </table:table-cell>
          <table:table-cell table:style-name="Tabla39.A2" office:value-type="string">
            <text:p text:style-name="P3" loext:marker-style-name="T41"><text:span text:style-name="T41">18490</text:span><text:span text:style-name="T41"/></text:p>
          </table:table-cell>
          <table:table-cell table:style-name="Tabla39.A2" office:value-type="string">
            <text:p text:style-name="P3" loext:marker-style-name="T41"><text:span text:style-name="T41">18726</text:span><text:span text:style-name="T41"/></text:p>
          </table:table-cell>
          <table:table-cell table:style-name="Tabla39.A2" office:value-type="string">
            <text:p text:style-name="P3" loext:marker-style-name="T41"><text:span text:style-name="T41">18923</text:span><text:span text:style-name="T41"/></text:p>
          </table:table-cell>
          <table:table-cell table:style-name="Tabla39.A2" office:value-type="string">
            <text:p text:style-name="P3" loext:marker-style-name="T41"><text:span text:style-name="T41">19159</text:span><text:span text:style-name="T41"/></text:p>
          </table:table-cell>
          <table:table-cell table:style-name="Tabla39.A2" office:value-type="string">
            <text:p text:style-name="P3" loext:marker-style-name="T41"><text:span text:style-name="T41">19355</text:span><text:span text:style-name="T41"/></text:p>
          </table:table-cell>
          <table:table-cell table:style-name="Tabla39.A2" office:value-type="string">
            <text:p text:style-name="P3" loext:marker-style-name="T41"><text:span text:style-name="T41">19552</text:span><text:span text:style-name="T41"/></text:p>
          </table:table-cell>
          <table:table-cell table:style-name="Tabla39.A2" office:value-type="string">
            <text:p text:style-name="P3" loext:marker-style-name="T41"><text:span text:style-name="T41">19788</text:span><text:span text:style-name="T41"/></text:p>
          </table:table-cell>
          <table:table-cell table:style-name="Tabla39.A2" office:value-type="string">
            <text:p text:style-name="P3" loext:marker-style-name="T41"><text:span text:style-name="T41">19985</text:span><text:span text:style-name="T41"/></text:p>
          </table:table-cell>
          <table:table-cell table:style-name="Tabla39.A2" office:value-type="string">
            <text:p text:style-name="P3" loext:marker-style-name="T41"><text:span text:style-name="T41">20221</text:span><text:span text:style-name="T41"/></text:p>
          </table:table-cell>
          <table:table-cell table:style-name="Tabla39.A2" office:value-type="string">
            <text:p text:style-name="P3" loext:marker-style-name="T41"><text:span text:style-name="T41">20418</text:span><text:span text:style-name="T41"/></text:p>
          </table:table-cell>
          <table:table-cell table:style-name="Tabla39.A2" office:value-type="string">
            <text:p text:style-name="P3" loext:marker-style-name="T42"><text:span text:style-name="T42">20654</text:span><text:span text:style-name="T42"/></text:p>
          </table:table-cell>
          <table:table-cell table:style-name="Tabla39.A2" office:value-type="string">
            <text:p text:style-name="P3" loext:marker-style-name="T42"><text:span text:style-name="T42">233564</text:span><text:span text:style-name="T42"/></text:p>
          </table:table-cell>
        </table:table-row>
        <table:table-row table:style-name="Tabla39.2">
          <table:table-cell table:style-name="Tabla39.A2" table:number-columns-spanned="2" office:value-type="string">
            <text:p text:style-name="P3" loext:marker-style-name="T41"><text:span text:style-name="T41">3</text:span><text:span text:style-name="T41"/></text:p>
          </table:table-cell>
          <table:covered-table-cell/>
          <table:table-cell table:style-name="Tabla39.A2" office:value-type="string">
            <text:p text:style-name="P3" loext:marker-style-name="T41"><text:span text:style-name="T41">39</text:span><text:span text:style-name="T41"/></text:p>
          </table:table-cell>
          <table:table-cell table:style-name="Tabla39.A2" office:value-type="string">
            <text:p text:style-name="P3" loext:marker-style-name="T41"><text:span text:style-name="T41">20850</text:span><text:span text:style-name="T41"/></text:p>
          </table:table-cell>
          <table:table-cell table:style-name="Tabla39.A2" office:value-type="string">
            <text:p text:style-name="P3" loext:marker-style-name="T41"><text:span text:style-name="T41">21086</text:span><text:span text:style-name="T41"/></text:p>
          </table:table-cell>
          <table:table-cell table:style-name="Tabla39.A2" office:value-type="string">
            <text:p text:style-name="P3" loext:marker-style-name="T41"><text:span text:style-name="T41">21283</text:span><text:span text:style-name="T41"/></text:p>
          </table:table-cell>
          <table:table-cell table:style-name="Tabla39.A2" office:value-type="string">
            <text:p text:style-name="P3" loext:marker-style-name="T41"><text:span text:style-name="T41">21480</text:span><text:span text:style-name="T41"/></text:p>
          </table:table-cell>
          <table:table-cell table:style-name="Tabla39.A2" office:value-type="string">
            <text:p text:style-name="P3" loext:marker-style-name="T41"><text:span text:style-name="T41">21716</text:span><text:span text:style-name="T41"/></text:p>
          </table:table-cell>
          <table:table-cell table:style-name="Tabla39.A2" office:value-type="string">
            <text:p text:style-name="P3" loext:marker-style-name="T41"><text:span text:style-name="T41">21913</text:span><text:span text:style-name="T41"/></text:p>
          </table:table-cell>
          <table:table-cell table:style-name="Tabla39.A2" office:value-type="string">
            <text:p text:style-name="P3" loext:marker-style-name="T41"><text:span text:style-name="T41">22149</text:span><text:span text:style-name="T41"/></text:p>
          </table:table-cell>
          <table:table-cell table:style-name="Tabla39.A2" office:value-type="string">
            <text:p text:style-name="P3" loext:marker-style-name="T41"><text:span text:style-name="T41">22345</text:span><text:span text:style-name="T41"/></text:p>
          </table:table-cell>
          <table:table-cell table:style-name="Tabla39.A2" office:value-type="string">
            <text:p text:style-name="P3" loext:marker-style-name="T41"><text:span text:style-name="T41">22581</text:span><text:span text:style-name="T41"/></text:p>
          </table:table-cell>
          <table:table-cell table:style-name="Tabla39.A2" office:value-type="string">
            <text:p text:style-name="P3" loext:marker-style-name="T41"><text:span text:style-name="T41">22778</text:span><text:span text:style-name="T41"/></text:p>
          </table:table-cell>
          <table:table-cell table:style-name="Tabla39.A2" office:value-type="string">
            <text:p text:style-name="P3" loext:marker-style-name="T41"><text:span text:style-name="T41">23014</text:span><text:span text:style-name="T41"/></text:p>
          </table:table-cell>
          <table:table-cell table:style-name="Tabla39.A2" office:value-type="string">
            <text:p text:style-name="P3" loext:marker-style-name="T42"><text:span text:style-name="T42">23211</text:span><text:span text:style-name="T42"/></text:p>
          </table:table-cell>
          <table:table-cell table:style-name="Tabla39.A2" office:value-type="string">
            <text:p text:style-name="P3" loext:marker-style-name="T42"><text:span text:style-name="T42">264407</text:span><text:span text:style-name="T42"/></text:p>
          </table:table-cell>
        </table:table-row>
        <table:table-row table:style-name="Tabla39.2">
          <table:table-cell table:style-name="Tabla39.A2" table:number-columns-spanned="2" office:value-type="string">
            <text:p text:style-name="P3" loext:marker-style-name="T41"><text:span text:style-name="T41">4</text:span><text:span text:style-name="T41"/></text:p>
          </table:table-cell>
          <table:covered-table-cell/>
          <table:table-cell table:style-name="Tabla39.A2" office:value-type="string">
            <text:p text:style-name="P3" loext:marker-style-name="T41"><text:span text:style-name="T41">39</text:span><text:span text:style-name="T41"/></text:p>
          </table:table-cell>
          <table:table-cell table:style-name="Tabla39.A2" office:value-type="string">
            <text:p text:style-name="P3" loext:marker-style-name="T41"><text:span text:style-name="T41">2347</text:span><text:span text:style-name="T41"/></text:p>
          </table:table-cell>
          <table:table-cell table:style-name="Tabla39.A2" office:value-type="string">
            <text:p text:style-name="P3" loext:marker-style-name="T41"><text:span text:style-name="T41">23644</text:span><text:span text:style-name="T41"/></text:p>
          </table:table-cell>
          <table:table-cell table:style-name="Tabla39.A2" office:value-type="string">
            <text:p text:style-name="P3" loext:marker-style-name="T41"><text:span text:style-name="T41">23840</text:span><text:span text:style-name="T41"/></text:p>
          </table:table-cell>
          <table:table-cell table:style-name="Tabla39.A2" office:value-type="string">
            <text:p text:style-name="P3" loext:marker-style-name="T41"><text:span text:style-name="T41">24076</text:span><text:span text:style-name="T41"/></text:p>
          </table:table-cell>
          <table:table-cell table:style-name="Tabla39.A2" office:value-type="string">
            <text:p text:style-name="P3" loext:marker-style-name="T41"><text:span text:style-name="T41">24273</text:span><text:span text:style-name="T41"/></text:p>
          </table:table-cell>
          <table:table-cell table:style-name="Tabla39.A2" office:value-type="string">
            <text:p text:style-name="P3" loext:marker-style-name="T41"><text:span text:style-name="T41">24509</text:span><text:span text:style-name="T41"/></text:p>
          </table:table-cell>
          <table:table-cell table:style-name="Tabla39.A2" office:value-type="string">
            <text:p text:style-name="P3" loext:marker-style-name="T41"><text:span text:style-name="T41">24706</text:span><text:span text:style-name="T41"/></text:p>
          </table:table-cell>
          <table:table-cell table:style-name="Tabla39.A2" office:value-type="string">
            <text:p text:style-name="P3" loext:marker-style-name="T41"><text:span text:style-name="T41">24942</text:span><text:span text:style-name="T41"/></text:p>
          </table:table-cell>
          <table:table-cell table:style-name="Tabla39.A2" office:value-type="string">
            <text:p text:style-name="P3" loext:marker-style-name="T41"><text:span text:style-name="T41">2539</text:span><text:span text:style-name="T41"/></text:p>
          </table:table-cell>
          <table:table-cell table:style-name="Tabla39.A2" office:value-type="string">
            <text:p text:style-name="P3" loext:marker-style-name="T41"><text:span text:style-name="T41">25375</text:span><text:span text:style-name="T41"/></text:p>
          </table:table-cell>
          <table:table-cell table:style-name="Tabla39.A2" office:value-type="string">
            <text:p text:style-name="P3" loext:marker-style-name="T41"><text:span text:style-name="T41">25571</text:span><text:span text:style-name="T41"/></text:p>
          </table:table-cell>
          <table:table-cell table:style-name="Tabla39.A2" office:value-type="string">
            <text:p text:style-name="P3" loext:marker-style-name="T42"><text:span text:style-name="T42">25768</text:span><text:span text:style-name="T42"/></text:p>
          </table:table-cell>
          <table:table-cell table:style-name="Tabla39.A2" office:value-type="string">
            <text:p text:style-name="P3" loext:marker-style-name="T42"><text:span text:style-name="T42">295289</text:span><text:span text:style-name="T42"/></text:p>
          </table:table-cell>
        </table:table-row>
        <table:table-row table:style-name="Tabla39.2">
          <table:table-cell table:style-name="Tabla39.A6" table:number-columns-spanned="2" office:value-type="string">
            <text:p text:style-name="P3" loext:marker-style-name="T41"><text:span text:style-name="T41">5</text:span><text:span text:style-name="T41"/></text:p>
          </table:table-cell>
          <table:covered-table-cell/>
          <table:table-cell table:style-name="Tabla39.A6" office:value-type="string">
            <text:p text:style-name="P3" loext:marker-style-name="T41"><text:span text:style-name="T41">39</text:span><text:span text:style-name="T41"/></text:p>
          </table:table-cell>
          <table:table-cell table:style-name="Tabla39.A6" office:value-type="string">
            <text:p text:style-name="P3" loext:marker-style-name="T41"><text:span text:style-name="T41">26004</text:span><text:span text:style-name="T41"/></text:p>
          </table:table-cell>
          <table:table-cell table:style-name="Tabla39.A6" office:value-type="string">
            <text:p text:style-name="P3" loext:marker-style-name="T41"><text:span text:style-name="T41">26201</text:span><text:span text:style-name="T41"/></text:p>
          </table:table-cell>
          <table:table-cell table:style-name="Tabla39.A6" office:value-type="string">
            <text:p text:style-name="P3" loext:marker-style-name="T41"><text:span text:style-name="T41">26437</text:span><text:span text:style-name="T41"/></text:p>
          </table:table-cell>
          <table:table-cell table:style-name="Tabla39.A6" office:value-type="string">
            <text:p text:style-name="P3" loext:marker-style-name="T41"><text:span text:style-name="T41">26633</text:span><text:span text:style-name="T41"/></text:p>
          </table:table-cell>
          <table:table-cell table:style-name="Tabla39.A6" office:value-type="string">
            <text:p text:style-name="P3" loext:marker-style-name="T41"><text:span text:style-name="T41">26869</text:span><text:span text:style-name="T41"/></text:p>
          </table:table-cell>
          <table:table-cell table:style-name="Tabla39.A6" office:value-type="string">
            <text:p text:style-name="P3" loext:marker-style-name="T41"><text:span text:style-name="T41">27066</text:span><text:span text:style-name="T41"/></text:p>
          </table:table-cell>
          <table:table-cell table:style-name="Tabla39.A6" office:value-type="string">
            <text:p text:style-name="P3" loext:marker-style-name="T41"><text:span text:style-name="T41">27302</text:span><text:span text:style-name="T41"/></text:p>
          </table:table-cell>
          <table:table-cell table:style-name="Tabla39.A6" office:value-type="string">
            <text:p text:style-name="P3" loext:marker-style-name="T41"><text:span text:style-name="T41">27499</text:span><text:span text:style-name="T41"/></text:p>
          </table:table-cell>
          <table:table-cell table:style-name="Tabla39.A6" office:value-type="string">
            <text:p text:style-name="P3" loext:marker-style-name="T41"><text:span text:style-name="T41">27696</text:span><text:span text:style-name="T41"/></text:p>
          </table:table-cell>
          <table:table-cell table:style-name="Tabla39.A6" office:value-type="string">
            <text:p text:style-name="P3" loext:marker-style-name="T41"><text:span text:style-name="T41">27932</text:span><text:span text:style-name="T41"/></text:p>
          </table:table-cell>
          <table:table-cell table:style-name="Tabla39.A6" office:value-type="string">
            <text:p text:style-name="P3" loext:marker-style-name="T41"><text:span text:style-name="T41">28128</text:span><text:span text:style-name="T41"/></text:p>
          </table:table-cell>
          <table:table-cell table:style-name="Tabla39.A6" office:value-type="string">
            <text:p text:style-name="P3" loext:marker-style-name="T42"><text:span text:style-name="T42">28364</text:span><text:span text:style-name="T42"/></text:p>
          </table:table-cell>
          <table:table-cell table:style-name="Tabla39.A6" office:value-type="string">
            <text:p text:style-name="P3" loext:marker-style-name="T42"><text:span text:style-name="T42">326132</text:span><text:span text:style-name="T42"/></text:p>
          </table:table-cell>
        </table:table-row>
      </table:table>
      <text:p text:style-name="P109" loext:marker-style-name="T4"><text:span text:style-name="T4">Nota: elaboración propia.</text:span><text:span text:style-name="T4"/></text:p>
      <text:p text:style-name="P112" loext:marker-style-name="T4"/>
      <text:p text:style-name="P111" loext:marker-style-name="T4"/>
      <text:p text:style-name="P111" loext:marker-style-name="T4"/>
      <text:h text:style-name="P78" text:outline-level="2" loext:marker-style-name="T4"><text:bookmark-start text:name="_Toc106699187"/><text:span text:style-name="T4">6.3. <text:s/>Costos Unitarios</text:span><text:bookmark-end text:name="_Toc106699187"/><text:span text:style-name="T4"/></text:h>
      <text:p text:style-name="P202" loext:marker-style-name="T14"><text:bookmark-start text:name="_Toc75271103"/><text:bookmark-start text:name="_Toc106698918"/><text:bookmark-start text:name="_Toc75271350"/><text:bookmark-start text:name="_Toc75271201"/><text:span text:style-name="T14">Tabla </text:span><text:bookmark-end text:name="_Toc75271103"/><text:bookmark-end text:name="_Toc106698918"/><text:bookmark-end text:name="_Toc75271350"/><text:bookmark-end text:name="_Toc75271201"/><text:span text:style-name="T14"><text:sequence text:ref-name="refTable19" text:name="Table" text:formula="ooow:Table+1" style:num-format="1">20</text:sequence></text:span><text:span text:style-name="T14"><text:s/></text:span></text:p>
      <text:p text:style-name="P202" loext:marker-style-name="T4"><text:span text:style-name="T4">Costo unitario lote 300 polos.</text:span><text:span text:style-name="T4"/></text:p>
      <table:table table:name="Tabla41" table:style-name="Tabla41">
        <table:table-column table:style-name="Tabla41.A"/>
        <table:table-column table:style-name="Tabla41.B"/>
        <table:table-row table:style-name="Tabla41.1">
          <table:table-cell table:style-name="Tabla41.A1" office:value-type="string">
            <text:p text:style-name="P3" loext:marker-style-name="T41"><text:span text:style-name="T41">Costo fijo </text:span><text:span text:style-name="T41"/></text:p>
          </table:table-cell>
          <table:table-cell table:style-name="Tabla41.A1" office:value-type="string">
            <text:p text:style-name="P3" loext:marker-style-name="T41"><text:span text:style-name="T41">Soles</text:span><text:span text:style-name="T41"/></text:p>
          </table:table-cell>
        </table:table-row>
        <table:table-row table:style-name="Tabla41.1">
          <table:table-cell table:style-name="Tabla41.A2" office:value-type="string">
            <text:p text:style-name="P3" loext:marker-style-name="T41"><text:span text:style-name="T41">Gastos de producción</text:span><text:span text:style-name="T41"/></text:p>
          </table:table-cell>
          <table:table-cell table:style-name="Tabla41.A2" office:value-type="string">
            <text:p text:style-name="P3" loext:marker-style-name="T41"><text:span text:style-name="T41">248,66</text:span><text:span text:style-name="T41"/></text:p>
          </table:table-cell>
        </table:table-row>
        <table:table-row table:style-name="Tabla41.1">
          <table:table-cell table:style-name="Tabla41.A3" office:value-type="string">
            <text:p text:style-name="P3" loext:marker-style-name="T41"><text:span text:style-name="T41">Gastos administrativos</text:span><text:span text:style-name="T41"/></text:p>
          </table:table-cell>
          <table:table-cell table:style-name="Tabla41.A3" office:value-type="string">
            <text:p text:style-name="P3" loext:marker-style-name="T41"><text:span text:style-name="T41">2438,06</text:span><text:span text:style-name="T41"/></text:p>
          </table:table-cell>
        </table:table-row>
        <table:table-row table:style-name="Tabla41.1">
          <table:table-cell table:style-name="Tabla41.A3" office:value-type="string">
            <text:p text:style-name="P3" loext:marker-style-name="T41"><text:span text:style-name="T41">Gastos de ventas</text:span><text:span text:style-name="T41"/></text:p>
          </table:table-cell>
          <table:table-cell table:style-name="Tabla41.A3" office:value-type="string">
            <text:p text:style-name="P3" loext:marker-style-name="T41"><text:span text:style-name="T41">1770,00</text:span><text:span text:style-name="T41"/></text:p>
          </table:table-cell>
        </table:table-row>
        <table:table-row table:style-name="Tabla41.1">
          <table:table-cell table:style-name="Tabla41.A3" office:value-type="string">
            <text:p text:style-name="P3" loext:marker-style-name="T41"><text:span text:style-name="T41">Total, Costo Fijo</text:span><text:span text:style-name="T41"/></text:p>
          </table:table-cell>
          <table:table-cell table:style-name="Tabla41.A3" office:value-type="string">
            <text:p text:style-name="P3" loext:marker-style-name="T41"><text:span text:style-name="T41">4456,71</text:span><text:span text:style-name="T41"/></text:p>
          </table:table-cell>
        </table:table-row>
        <table:table-row table:style-name="Tabla41.1">
          <table:table-cell table:style-name="Tabla41.A6" office:value-type="string">
            <text:p text:style-name="P3" loext:marker-style-name="T41"><text:span text:style-name="T41">Costo variable</text:span><text:span text:style-name="T41"/></text:p>
          </table:table-cell>
          <table:table-cell table:style-name="Tabla41.A6" office:value-type="string">
            <text:p text:style-name="P3" loext:marker-style-name="T41"><text:span text:style-name="T41">Soles</text:span><text:span text:style-name="T41"/></text:p>
          </table:table-cell>
        </table:table-row>
        <table:table-row table:style-name="Tabla41.1">
          <table:table-cell table:style-name="Tabla41.A2" office:value-type="string">
            <text:p text:style-name="P3" loext:marker-style-name="T41"><text:span text:style-name="T41">Materia prima e insumos</text:span><text:span text:style-name="T41"/></text:p>
          </table:table-cell>
          <table:table-cell table:style-name="Tabla41.A2" office:value-type="string">
            <text:p text:style-name="P3" loext:marker-style-name="T41"><text:span text:style-name="T41">5230,40</text:span><text:span text:style-name="T41"/></text:p>
          </table:table-cell>
        </table:table-row>
        <table:table-row table:style-name="Tabla41.1">
          <table:table-cell table:style-name="Tabla41.A3" office:value-type="string">
            <text:p text:style-name="P3" loext:marker-style-name="T41"><text:span text:style-name="T41">Mano de obra</text:span><text:span text:style-name="T41"/></text:p>
          </table:table-cell>
          <table:table-cell table:style-name="Tabla41.A3" office:value-type="string">
            <text:p text:style-name="P3" loext:marker-style-name="T41"><text:span text:style-name="T41">2115,00</text:span><text:span text:style-name="T41"/></text:p>
          </table:table-cell>
        </table:table-row>
        <table:table-row table:style-name="Tabla41.1">
          <table:table-cell table:style-name="Tabla41.A3" office:value-type="string">
            <text:p text:style-name="P3" loext:marker-style-name="T41"><text:span text:style-name="T41">Costos indirectos de fabricación</text:span><text:span text:style-name="T41"/></text:p>
          </table:table-cell>
          <table:table-cell table:style-name="Tabla41.A3" office:value-type="string">
            <text:p text:style-name="P40" loext:marker-style-name="T41"/>
          </table:table-cell>
        </table:table-row>
        <table:table-row table:style-name="Tabla41.1">
          <table:table-cell table:style-name="Tabla41.A3" office:value-type="string">
            <text:p text:style-name="P3" loext:marker-style-name="T41"><text:span text:style-name="T41">Total, Costo Variable</text:span><text:span text:style-name="T41"/></text:p>
          </table:table-cell>
          <table:table-cell table:style-name="Tabla41.A3" office:value-type="string">
            <text:p text:style-name="P3" loext:marker-style-name="T41"><text:span text:style-name="T41">7345,40</text:span><text:span text:style-name="T41"/></text:p>
          </table:table-cell>
        </table:table-row>
        <table:table-row table:style-name="Tabla41.1">
          <table:table-cell table:style-name="Tabla41.A3" office:value-type="string">
            <text:p text:style-name="P3" loext:marker-style-name="T41"><text:span text:style-name="T41">Nº de polos de 300 Unid.</text:span><text:span text:style-name="T41"/></text:p>
          </table:table-cell>
          <table:table-cell table:style-name="Tabla41.A3" office:value-type="string">
            <text:p text:style-name="P3" loext:marker-style-name="T41"><text:span text:style-name="T41">300</text:span><text:span text:style-name="T41"/></text:p>
          </table:table-cell>
        </table:table-row>
        <table:table-row table:style-name="Tabla41.1">
          <table:table-cell table:style-name="Tabla41.A3" office:value-type="string">
            <text:p text:style-name="P3" loext:marker-style-name="T41"><text:span text:style-name="T41">Costo fijo unitario (100%)</text:span><text:span text:style-name="T41"/></text:p>
          </table:table-cell>
          <table:table-cell table:style-name="Tabla41.A3" office:value-type="string">
            <text:p text:style-name="P3" loext:marker-style-name="T41"><text:span text:style-name="T41">14,86</text:span><text:span text:style-name="T41"/></text:p>
          </table:table-cell>
        </table:table-row>
        <table:table-row table:style-name="Tabla41.1">
          <table:table-cell table:style-name="Tabla41.A3" office:value-type="string">
            <text:p text:style-name="P3" loext:marker-style-name="T41"><text:span text:style-name="T41">Costo variable unitario</text:span><text:span text:style-name="T41"/></text:p>
          </table:table-cell>
          <table:table-cell table:style-name="Tabla41.A3" office:value-type="string">
            <text:p text:style-name="P3" loext:marker-style-name="T41"><text:span text:style-name="T41">24,48</text:span><text:span text:style-name="T41"/></text:p>
          </table:table-cell>
        </table:table-row>
        <table:table-row table:style-name="Tabla41.14">
          <table:table-cell table:style-name="Tabla41.A6" office:value-type="string">
            <text:p text:style-name="P3" loext:marker-style-name="T41"><text:span text:style-name="T41">Costo total unitario</text:span><text:span text:style-name="T41"/></text:p>
          </table:table-cell>
          <table:table-cell table:style-name="Tabla41.A6" office:value-type="string">
            <text:p text:style-name="P3" loext:marker-style-name="T41"><text:span text:style-name="T41">39,19</text:span><text:span text:style-name="T41"/></text:p>
          </table:table-cell>
        </table:table-row>
      </table:table>
      <text:p text:style-name="P109" loext:marker-style-name="T4"><text:span text:style-name="T4"><text:s/></text:span><text:span text:style-name="T15">Nota.</text:span><text:span text:style-name="T4"> Elaboración propia.</text:span></text:p>
      <text:h text:style-name="P78" text:outline-level="2" loext:marker-style-name="T22"><text:bookmark-start text:name="_Toc106699188"/><text:span text:style-name="T4">6.4. Estado de Resultados</text:span><text:bookmark-end text:name="_Toc106699188"/><text:span text:style-name="T22"/></text:h>
      <text:p text:style-name="P202" loext:marker-style-name="T14"><text:bookmark-start text:name="_Toc75271104"/><text:bookmark-start text:name="_Toc106698919"/><text:bookmark-start text:name="_Toc75271351"/><text:bookmark-start text:name="_Toc75271202"/><text:span text:style-name="T14">Tabla </text:span><text:bookmark-end text:name="_Toc75271104"/><text:bookmark-end text:name="_Toc106698919"/><text:bookmark-end text:name="_Toc75271351"/><text:bookmark-end text:name="_Toc75271202"/><text:span text:style-name="T14"><text:sequence text:ref-name="refTable20" text:name="Table" text:formula="ooow:Table+1" style:num-format="1">21</text:sequence></text:span><text:span text:style-name="T14"><text:s/></text:span></text:p>
      <text:p text:style-name="P202" loext:marker-style-name="T20"><text:span text:style-name="T4">Proyección del estado de resultados para 5 años.</text:span><text:span text:style-name="T20"/></text:p>
      <text:p text:style-name="Notas_20_APA" loext:marker-style-name="T21"><draw:frame draw:style-name="fr1" draw:name="Marco24" text:anchor-type="paragraph" svg:y="0.584cm" svg:width="18.403cm" draw:z-index="60" loext:may-break-between-pages="true"><draw:text-box fo:min-height="0cm"><table:table table:name="Tabla42" table:style-name="Tabla42"><table:table-column table:style-name="Tabla42.A"/><table:table-column table:style-name="Tabla42.B" table:number-columns-repeated="2"/><table:table-column table:style-name="Tabla42.D"/><table:table-column table:style-name="Tabla42.B" table:number-columns-repeated="2"/><table:table-row table:style-name="Tabla42.1"><table:table-cell table:style-name="Tabla42.A1" office:value-type="string"><text:p text:style-name="P15" loext:marker-style-name="T44"><text:span text:style-name="T44">Rubro</text:span></text:p></table:table-cell><table:table-cell table:style-name="Tabla42.A1" office:value-type="string"><text:p text:style-name="P15" loext:marker-style-name="T44"><text:span text:style-name="T44">Año 1</text:span></text:p></table:table-cell><table:table-cell table:style-name="Tabla42.A1" office:value-type="string"><text:p text:style-name="P15" loext:marker-style-name="T44"><text:span text:style-name="T44">Año 2</text:span></text:p></table:table-cell><table:table-cell table:style-name="Tabla42.A1" office:value-type="string"><text:p text:style-name="P15" loext:marker-style-name="T44"><text:span text:style-name="T44">Año 3</text:span></text:p></table:table-cell><table:table-cell table:style-name="Tabla42.A1" office:value-type="string"><text:p text:style-name="P15" loext:marker-style-name="T44"><text:span text:style-name="T44">Año 4</text:span></text:p></table:table-cell><table:table-cell table:style-name="Tabla42.A1" office:value-type="string"><text:p text:style-name="P15" loext:marker-style-name="T44"><text:span text:style-name="T44">Año 5</text:span></text:p></table:table-cell></table:table-row><table:table-row table:style-name="Tabla42.1"><table:table-cell table:style-name="Tabla42.A2" office:value-type="string"><text:p text:style-name="P15" loext:marker-style-name="T41"><text:span text:style-name="T41">Ingreso por ventas</text:span></text:p></table:table-cell><table:table-cell table:style-name="Tabla42.A2" office:value-type="string"><text:p text:style-name="P15" loext:marker-style-name="T41"><text:span text:style-name="T41">196560.00</text:span></text:p></table:table-cell><table:table-cell table:style-name="Tabla42.A2" office:value-type="string"><text:p text:style-name="P15" loext:marker-style-name="T41"><text:span text:style-name="T41">231860.14</text:span></text:p></table:table-cell><table:table-cell table:style-name="Tabla42.A2" office:value-type="string"><text:p text:style-name="P15" loext:marker-style-name="T41"><text:span text:style-name="T41">267160.28</text:span></text:p></table:table-cell><table:table-cell table:style-name="Tabla42.A2" office:value-type="string"><text:p text:style-name="P15" loext:marker-style-name="T41"><text:span text:style-name="T41">302460.42</text:span></text:p></table:table-cell><table:table-cell table:style-name="Tabla42.A2" office:value-type="string"><text:p text:style-name="P15" loext:marker-style-name="T41"><text:span text:style-name="T41">337760.56</text:span></text:p></table:table-cell></table:table-row><table:table-row table:style-name="Tabla42.1"><table:table-cell table:style-name="Tabla42.A2" office:value-type="string"><text:p text:style-name="P15" loext:marker-style-name="T43"><text:span text:style-name="T41">Cantidad</text:span></text:p></table:table-cell><table:table-cell table:style-name="Tabla42.A2" office:value-type="string"><text:p text:style-name="P15" loext:marker-style-name="T43"><text:span text:style-name="T41">4368.00</text:span></text:p></table:table-cell><table:table-cell table:style-name="Tabla42.A2" office:value-type="string"><text:p text:style-name="P15" loext:marker-style-name="T43"><text:span text:style-name="T41">5152.45</text:span></text:p></table:table-cell><table:table-cell table:style-name="Tabla42.A2" office:value-type="string"><text:p text:style-name="P15" loext:marker-style-name="T43"><text:span text:style-name="T41">5936.90</text:span></text:p></table:table-cell><table:table-cell table:style-name="Tabla42.A2" office:value-type="string"><text:p text:style-name="P15" loext:marker-style-name="T43"><text:span text:style-name="T41">6721.34</text:span></text:p></table:table-cell><table:table-cell table:style-name="Tabla42.A2" office:value-type="string"><text:p text:style-name="P15" loext:marker-style-name="T43"><text:span text:style-name="T41">7505.79</text:span></text:p></table:table-cell></table:table-row><table:table-row table:style-name="Tabla42.4"><table:table-cell table:style-name="Tabla42.A2" office:value-type="string"><text:p text:style-name="P15" loext:marker-style-name="T41"><text:span text:style-name="T41">Precio</text:span></text:p></table:table-cell><table:table-cell table:style-name="Tabla42.A2" office:value-type="string"><text:p text:style-name="P15" loext:marker-style-name="T41"><text:span text:style-name="T41">45.00</text:span></text:p></table:table-cell><table:table-cell table:style-name="Tabla42.A2" office:value-type="string"><text:p text:style-name="P15" loext:marker-style-name="T41"><text:span text:style-name="T41">45.00</text:span></text:p></table:table-cell><table:table-cell table:style-name="Tabla42.A2" office:value-type="string"><text:p text:style-name="P15" loext:marker-style-name="T41"><text:span text:style-name="T41">45.00</text:span></text:p></table:table-cell><table:table-cell table:style-name="Tabla42.A2" office:value-type="string"><text:p text:style-name="P15" loext:marker-style-name="T41"><text:span text:style-name="T41">45.00</text:span></text:p></table:table-cell><table:table-cell table:style-name="Tabla42.A2" office:value-type="string"><text:p text:style-name="P15" loext:marker-style-name="T41"><text:span text:style-name="T41">45.00</text:span></text:p></table:table-cell></table:table-row><table:table-row table:style-name="Tabla42.1"><table:table-cell table:style-name="Tabla42.A2" office:value-type="string"><text:p text:style-name="P15" loext:marker-style-name="T41"><text:span text:style-name="T41">Costo de ventas</text:span></text:p></table:table-cell><table:table-cell table:style-name="Tabla42.A2" office:value-type="string"><text:p text:style-name="P15" loext:marker-style-name="T41"><text:span text:style-name="T41">21240.00</text:span></text:p></table:table-cell><table:table-cell table:style-name="Tabla42.A2" office:value-type="string"><text:p text:style-name="P15" loext:marker-style-name="T41"><text:span text:style-name="T41">21240.00</text:span></text:p></table:table-cell><table:table-cell table:style-name="Tabla42.A2" office:value-type="string"><text:p text:style-name="P15" loext:marker-style-name="T41"><text:span text:style-name="T41">21240.00</text:span></text:p></table:table-cell><table:table-cell table:style-name="Tabla42.A2" office:value-type="string"><text:p text:style-name="P15" loext:marker-style-name="T41"><text:span text:style-name="T41">21240.00</text:span></text:p></table:table-cell><table:table-cell table:style-name="Tabla42.A2" office:value-type="string"><text:p text:style-name="P15" loext:marker-style-name="T41"><text:span text:style-name="T41">21240.00</text:span></text:p></table:table-cell></table:table-row><table:table-row table:style-name="Tabla42.1"><table:table-cell table:style-name="Tabla42.A2" office:value-type="string"><text:p text:style-name="P15" loext:marker-style-name="T41"><text:span text:style-name="T41">Costos de producción</text:span></text:p></table:table-cell><table:table-cell table:style-name="Tabla42.A2" office:value-type="string"><text:p text:style-name="P15" loext:marker-style-name="T41"><text:span text:style-name="T41">106949.02</text:span></text:p></table:table-cell><table:table-cell table:style-name="Tabla42.A2" office:value-type="string"><text:p text:style-name="P15" loext:marker-style-name="T41"><text:span text:style-name="T41">126155.96</text:span></text:p></table:table-cell><table:table-cell table:style-name="Tabla42.A2" office:value-type="string"><text:p text:style-name="P15" loext:marker-style-name="T41"><text:span text:style-name="T41">145362.90</text:span></text:p></table:table-cell><table:table-cell table:style-name="Tabla42.A2" office:value-type="string"><text:p text:style-name="P15" loext:marker-style-name="T41"><text:span text:style-name="T41">164569.83</text:span></text:p></table:table-cell><table:table-cell table:style-name="Tabla42.A2" office:value-type="string"><text:p text:style-name="P15" loext:marker-style-name="T41"><text:span text:style-name="T41">183776.77</text:span></text:p></table:table-cell></table:table-row><table:table-row table:style-name="Tabla42.1"><table:table-cell table:style-name="Tabla42.A2" office:value-type="string"><text:p text:style-name="P15" loext:marker-style-name="T43"><text:span text:style-name="T41">Depreciación de activos fijos</text:span></text:p></table:table-cell><table:table-cell table:style-name="Tabla42.A2" office:value-type="string"><text:p text:style-name="P15" loext:marker-style-name="T43"><text:span text:style-name="T41">4237.18</text:span></text:p></table:table-cell><table:table-cell table:style-name="Tabla42.A2" office:value-type="string"><text:p text:style-name="P15" loext:marker-style-name="T43"><text:span text:style-name="T41">4237.18</text:span></text:p></table:table-cell><table:table-cell table:style-name="Tabla42.A2" office:value-type="string"><text:p text:style-name="P15" loext:marker-style-name="T43"><text:span text:style-name="T41">4237.18</text:span></text:p></table:table-cell><table:table-cell table:style-name="Tabla42.A2" office:value-type="string"><text:p text:style-name="P15" loext:marker-style-name="T43"><text:span text:style-name="T41">4237.18</text:span></text:p></table:table-cell><table:table-cell table:style-name="Tabla42.A2" office:value-type="string"><text:p text:style-name="P15" loext:marker-style-name="T43"><text:span text:style-name="T41">4237.18</text:span></text:p></table:table-cell></table:table-row><table:table-row table:style-name="Tabla42.4"><table:table-cell table:style-name="Tabla42.A2" office:value-type="string"><text:p text:style-name="P15" loext:marker-style-name="T41"><text:span text:style-name="T41">Utilidad Bruta</text:span></text:p></table:table-cell><table:table-cell table:style-name="Tabla42.A2" office:value-type="string"><text:p text:style-name="P15" loext:marker-style-name="T41"><text:span text:style-name="T41">85373.80</text:span></text:p></table:table-cell><table:table-cell table:style-name="Tabla42.A2" office:value-type="string"><text:p text:style-name="P15" loext:marker-style-name="T41"><text:span text:style-name="T41">101467.00</text:span></text:p></table:table-cell><table:table-cell table:style-name="Tabla42.A2" office:value-type="string"><text:p text:style-name="P15" loext:marker-style-name="T41"><text:span text:style-name="T41">117560.21</text:span></text:p></table:table-cell><table:table-cell table:style-name="Tabla42.A2" office:value-type="string"><text:p text:style-name="P15" loext:marker-style-name="T41"><text:span text:style-name="T41">133653.41</text:span></text:p></table:table-cell><table:table-cell table:style-name="Tabla42.A2" office:value-type="string"><text:p text:style-name="P15" loext:marker-style-name="T41"><text:span text:style-name="T41">149746.61</text:span></text:p></table:table-cell></table:table-row><table:table-row table:style-name="Tabla42.1"><table:table-cell table:style-name="Tabla42.A2" office:value-type="string"><text:p text:style-name="P15" loext:marker-style-name="T41"><text:span text:style-name="T41">Gastos Operativos</text:span></text:p></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row><table:table-row table:style-name="Tabla42.1"><table:table-cell table:style-name="Tabla42.A2" office:value-type="string"><text:p text:style-name="P15" loext:marker-style-name="T43"><text:span text:style-name="T41">Gastos de venta</text:span></text:p></table:table-cell><table:table-cell table:style-name="Tabla42.A2" office:value-type="string"><text:p text:style-name="P15" loext:marker-style-name="T43"><text:span text:style-name="T41">21420.00</text:span></text:p></table:table-cell><table:table-cell table:style-name="Tabla42.A2" office:value-type="string"><text:p text:style-name="P15" loext:marker-style-name="T41"><text:span text:style-name="T41">21420.00</text:span></text:p></table:table-cell><table:table-cell table:style-name="Tabla42.A2" office:value-type="string"><text:p text:style-name="P15" loext:marker-style-name="T41"><text:span text:style-name="T41">21420.00</text:span></text:p></table:table-cell><table:table-cell table:style-name="Tabla42.A2" office:value-type="string"><text:p text:style-name="P15" loext:marker-style-name="T41"><text:span text:style-name="T41">21420.00</text:span></text:p></table:table-cell><table:table-cell table:style-name="Tabla42.A2" office:value-type="string"><text:p text:style-name="P15" loext:marker-style-name="T41"><text:span text:style-name="T41">21420.00</text:span></text:p></table:table-cell></table:table-row><table:table-row table:style-name="Tabla42.4"><table:table-cell table:style-name="Tabla42.A2" office:value-type="string"><text:p text:style-name="P15" loext:marker-style-name="T41"><text:span text:style-name="T41">Gastos de administración</text:span></text:p></table:table-cell><table:table-cell table:style-name="Tabla42.A2" office:value-type="string"><text:p text:style-name="P15" loext:marker-style-name="T41"><text:span text:style-name="T41">27600.00</text:span></text:p></table:table-cell><table:table-cell table:style-name="Tabla42.A2" office:value-type="string"><text:p text:style-name="P15" loext:marker-style-name="T41"><text:span text:style-name="T41">27600.00</text:span></text:p></table:table-cell><table:table-cell table:style-name="Tabla42.A2" office:value-type="string"><text:p text:style-name="P15" loext:marker-style-name="T41"><text:span text:style-name="T41">27600.00</text:span></text:p></table:table-cell><table:table-cell table:style-name="Tabla42.A2" office:value-type="string"><text:p text:style-name="P15" loext:marker-style-name="T41"><text:span text:style-name="T41">27600.00</text:span></text:p></table:table-cell><table:table-cell table:style-name="Tabla42.A2" office:value-type="string"><text:p text:style-name="P15" loext:marker-style-name="T41"><text:span text:style-name="T41">27600.00</text:span></text:p></table:table-cell></table:table-row><table:table-row table:style-name="Tabla42.4"><table:table-cell table:style-name="Tabla42.A2" office:value-type="string"><text:p text:style-name="P15" loext:marker-style-name="T41"><text:span text:style-name="T41">Amortización de intangibles</text:span></text:p></table:table-cell><table:table-cell table:style-name="Tabla42.A2" office:value-type="string"><text:p text:style-name="P15" loext:marker-style-name="T41"><text:span text:style-name="T41">223.40</text:span></text:p></table:table-cell><table:table-cell table:style-name="Tabla42.A2" office:value-type="string"><text:p text:style-name="P15" loext:marker-style-name="T41"><text:span text:style-name="T41">223.40</text:span></text:p></table:table-cell><table:table-cell table:style-name="Tabla42.A2" office:value-type="string"><text:p text:style-name="P15" loext:marker-style-name="T41"><text:span text:style-name="T41">223.40</text:span></text:p></table:table-cell><table:table-cell table:style-name="Tabla42.A2" office:value-type="string"><text:p text:style-name="P15" loext:marker-style-name="T41"><text:span text:style-name="T41">223.40</text:span></text:p></table:table-cell><table:table-cell table:style-name="Tabla42.A2" office:value-type="string"><text:p text:style-name="P15" loext:marker-style-name="T41"><text:span text:style-name="T41">223.40</text:span></text:p></table:table-cell></table:table-row><table:table-row table:style-name="Tabla42.4"><table:table-cell table:style-name="Tabla42.A2" office:value-type="string"><text:p text:style-name="P15" loext:marker-style-name="T41"><text:span text:style-name="T41">Utilidad operativa</text:span></text:p></table:table-cell><table:table-cell table:style-name="Tabla42.A2" office:value-type="string"><text:p text:style-name="P15" loext:marker-style-name="T41"><text:span text:style-name="T41">36130.40</text:span></text:p></table:table-cell><table:table-cell table:style-name="Tabla42.A2" office:value-type="string"><text:p text:style-name="P15" loext:marker-style-name="T41"><text:span text:style-name="T41">52223.60</text:span></text:p></table:table-cell><table:table-cell table:style-name="Tabla42.A2" office:value-type="string"><text:p text:style-name="P15" loext:marker-style-name="T41"><text:span text:style-name="T41">68316.81</text:span></text:p></table:table-cell><table:table-cell table:style-name="Tabla42.A2" office:value-type="string"><text:p text:style-name="P15" loext:marker-style-name="T41"><text:span text:style-name="T41">84410.01</text:span></text:p></table:table-cell><table:table-cell table:style-name="Tabla42.A2" office:value-type="string"><text:p text:style-name="P15" loext:marker-style-name="T41"><text:span text:style-name="T41">100503.21</text:span></text:p></table:table-cell></table:table-row><table:table-row table:style-name="Tabla42.1"><table:table-cell table:style-name="Tabla42.A2" office:value-type="string"><text:p text:style-name="P15" loext:marker-style-name="T43"><text:span text:style-name="T41">Intereses</text:span></text:p></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cell table:style-name="Tabla42.A2" office:value-type="string"><text:p text:style-name="P37" loext:marker-style-name="T41"/></table:table-cell></table:table-row><table:table-row table:style-name="Tabla42.4"><table:table-cell table:style-name="Tabla42.A2" office:value-type="string"><text:p text:style-name="P15" loext:marker-style-name="T41"><text:span text:style-name="T41">Utilidad antes de Impuestos</text:span></text:p></table:table-cell><table:table-cell table:style-name="Tabla42.A2" office:value-type="string"><text:p text:style-name="P15" loext:marker-style-name="T41"><text:span text:style-name="T41">36130.40</text:span></text:p></table:table-cell><table:table-cell table:style-name="Tabla42.A2" office:value-type="string"><text:p text:style-name="P15" loext:marker-style-name="T41"><text:span text:style-name="T41">52223.60</text:span></text:p></table:table-cell><table:table-cell table:style-name="Tabla42.A2" office:value-type="string"><text:p text:style-name="P15" loext:marker-style-name="T41"><text:span text:style-name="T41">68316.81</text:span></text:p></table:table-cell><table:table-cell table:style-name="Tabla42.A2" office:value-type="string"><text:p text:style-name="P15" loext:marker-style-name="T41"><text:span text:style-name="T41">84410.01</text:span></text:p></table:table-cell><table:table-cell table:style-name="Tabla42.A2" office:value-type="string"><text:p text:style-name="P15" loext:marker-style-name="T41"><text:span text:style-name="T41">100503.21</text:span></text:p></table:table-cell></table:table-row><table:table-row table:style-name="Tabla42.1"><table:table-cell table:style-name="Tabla42.A2" office:value-type="string"><text:p text:style-name="P15" loext:marker-style-name="T43"><text:span text:style-name="T41">Impuesto a la renta</text:span></text:p></table:table-cell><table:table-cell table:style-name="Tabla42.A2" office:value-type="string"><text:p text:style-name="P15" loext:marker-style-name="T41"><text:span text:style-name="T41">541.96</text:span></text:p></table:table-cell><table:table-cell table:style-name="Tabla42.A2" office:value-type="string"><text:p text:style-name="P15" loext:marker-style-name="T41"><text:span text:style-name="T41">783.35</text:span></text:p></table:table-cell><table:table-cell table:style-name="Tabla42.A2" office:value-type="string"><text:p text:style-name="P15" loext:marker-style-name="T41"><text:span text:style-name="T41">1024.75</text:span></text:p></table:table-cell><table:table-cell table:style-name="Tabla42.A2" office:value-type="string"><text:p text:style-name="P15" loext:marker-style-name="T41"><text:span text:style-name="T41">1266.15</text:span></text:p></table:table-cell><table:table-cell table:style-name="Tabla42.A2" office:value-type="string"><text:p text:style-name="P15" loext:marker-style-name="T41"><text:span text:style-name="T41">1507.55</text:span></text:p></table:table-cell></table:table-row><table:table-row table:style-name="Tabla42.4"><table:table-cell table:style-name="Tabla42.A2" office:value-type="string"><text:p text:style-name="P15" loext:marker-style-name="T41"><text:span text:style-name="T41">Utilidad Neta</text:span></text:p></table:table-cell><table:table-cell table:style-name="Tabla42.A2" office:value-type="string"><text:p text:style-name="P15" loext:marker-style-name="T41"><text:span text:style-name="T41">35588.45</text:span></text:p></table:table-cell><table:table-cell table:style-name="Tabla42.A2" office:value-type="string"><text:p text:style-name="P15" loext:marker-style-name="T41"><text:span text:style-name="T41">51440.25</text:span></text:p></table:table-cell><table:table-cell table:style-name="Tabla42.A2" office:value-type="string"><text:p text:style-name="P15" loext:marker-style-name="T41"><text:span text:style-name="T41">67292.06</text:span></text:p></table:table-cell><table:table-cell table:style-name="Tabla42.A2" office:value-type="string"><text:p text:style-name="P15" loext:marker-style-name="T41"><text:span text:style-name="T41">83143.86</text:span></text:p></table:table-cell><table:table-cell table:style-name="Tabla42.A2" office:value-type="string"><text:p text:style-name="P15" loext:marker-style-name="T41"><text:span text:style-name="T41">98995.67</text:span></text:p></table:table-cell></table:table-row><table:table-row table:style-name="Tabla42.1"><table:table-cell table:style-name="Tabla42.A18" office:value-type="string"><text:p text:style-name="P35" loext:marker-style-name="T41"/></table:table-cell><table:table-cell table:style-name="Tabla42.A18" office:value-type="string"><text:p text:style-name="P35" loext:marker-style-name="T41"/></table:table-cell><table:table-cell table:style-name="Tabla42.A18" office:value-type="string"><text:p text:style-name="P35" loext:marker-style-name="T41"/></table:table-cell><table:table-cell table:style-name="Tabla42.A18" office:value-type="string"><text:p text:style-name="P35" loext:marker-style-name="T41"/></table:table-cell><table:table-cell table:style-name="Tabla42.A18" office:value-type="string"><text:p text:style-name="P35" loext:marker-style-name="T41"/></table:table-cell><table:table-cell table:style-name="Tabla42.A18" office:value-type="string"><text:p text:style-name="P35" loext:marker-style-name="T41"/></table:table-cell></table:table-row></table:table></draw:text-box></draw:frame><text:soft-page-break/><text:span text:style-name="T15">Nota.</text:span><text:span text:style-name="T4"> Elaboración propia.</text:span></text:p>
      <text:h text:style-name="P79" text:outline-level="2" loext:marker-style-name="T22"><text:bookmark-start text:name="_Toc106699189"/><text:span text:style-name="T4">6.5. Punto de Equilibrio</text:span><text:bookmark-end text:name="_Toc106699189"/><text:span text:style-name="T22"/></text:h>
      <text:p text:style-name="P202" loext:marker-style-name="T14"><text:span text:style-name="T14">Figura </text:span><text:span text:style-name="T14"><text:sequence text:ref-name="refFigure2" text:name="Figure" text:formula="ooow:Figure+1" style:num-format="1">3</text:sequence></text:span><text:span text:style-name="T14"><text:s/></text:span></text:p>
      <text:p text:style-name="P202" loext:marker-style-name="T4"><text:span text:style-name="T4">Punto de equilibrio de la empresa STAMPADEK.</text:span><text:span text:style-name="T4"/></text:p>
      <text:p text:style-name="P200" loext:marker-style-name="T68"><draw:frame draw:style-name="fr9" draw:name="Gráfico 6" text:anchor-type="char" svg:x="2.595cm" svg:y="0.076cm" svg:width="13.778cm" svg:height="9.081cm" draw:z-index="2"><draw:object xlink:href="./Object 3" xlink:type="simple" xlink:show="embed" xlink:actuate="onLoad"/><draw:image xlink:href="./ObjectReplacements/Object 3" xlink:type="simple" xlink:show="embed" xlink:actuate="onLoad"/></draw:frame></text:p>
      <text:p text:style-name="P109" loext:marker-style-name="T4"><text:span text:style-name="T4"><text:s text:c="6"/>Nota: elaboración propia.</text:span><text:span text:style-name="T4"/></text:p>
      <text:p text:style-name="Standard" loext:marker-style-name="T4"><text:span text:style-name="T4">El punto de equilibrio que presenta STAMPADEK es de S/. 154.71 unidades de polos y unas ventas de S/. 8199.83 soles. Por debajo de S/. 154.71 unidades la empresa presentará pérdidas, debido a que los costos serían mayores que los ingresos. Por encima de S/. 154.71 unidades se presentan utilidades debido a que los ingresos son mayores que los costes. El precio de venta es de S/. 53.00 soles y el costo variable unitario es de 24.48.</text:span><text:span text:style-name="T4"/></text:p>
      <text:h text:style-name="P68" text:outline-level="1" loext:marker-style-name="T4"><text:bookmark-start text:name="_Toc106699190"/><text:span text:style-name="T4">Capítulo VII. Financiamiento y Costo de Capital</text:span><text:bookmark-end text:name="_Toc106699190"/><text:span text:style-name="T4"/></text:h>
      <text:h text:style-name="P78" text:outline-level="2" loext:marker-style-name="T4"><text:bookmark-start text:name="_Toc106699191"/><text:span text:style-name="T4">7.1. <text:s/>Fuentes de Financiamiento</text:span><text:bookmark-end text:name="_Toc106699191"/><text:span text:style-name="T4"/></text:h>
      <text:p text:style-name="Standard" loext:marker-style-name="T4"><text:span text:style-name="T4">El financiamiento para el proyecto STAMP ADEK estará conformado por 24% (S/.5,766) con recursos propios de los socios, y el 76% (S/.18,000) estará cubierto de un </text:span><text:soft-page-break/><text:span text:style-name="T4">préstamo otorgado por la Cooperativa Santa María Magdalena a nombre del padre de una las socias bajo la modalidad de crédito personal.</text:span><text:span text:style-name="T4"/></text:p>
      <text:p text:style-name="P202" loext:marker-style-name="T14"><text:bookmark-start text:name="_Toc75271105"/><text:bookmark-start text:name="_Toc106698920"/><text:bookmark-start text:name="_Toc75271352"/><text:bookmark-start text:name="_Toc75271203"/><text:span text:style-name="T14">Tabla </text:span><text:bookmark-end text:name="_Toc75271105"/><text:bookmark-end text:name="_Toc106698920"/><text:bookmark-end text:name="_Toc75271352"/><text:bookmark-end text:name="_Toc75271203"/><text:span text:style-name="T14"><text:sequence text:ref-name="refTable21" text:name="Table" text:formula="ooow:Table+1" style:num-format="1">22</text:sequence></text:span><text:span text:style-name="T14"><text:s/></text:span></text:p>
      <text:p text:style-name="P202" loext:marker-style-name="T4"><text:span text:style-name="T4">Capital propio.</text:span><text:span text:style-name="T4"/></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 loext:marker-style-name="T16"><text:span text:style-name="T16">Aportantes</text:span><text:span text:style-name="T16"/></text:p>
          </table:table-cell>
          <table:table-cell table:style-name="Tabla43.A1" office:value-type="string">
            <text:p text:style-name="P1" loext:marker-style-name="T16"><text:span text:style-name="T16">Monto</text:span><text:span text:style-name="T16"/></text:p>
          </table:table-cell>
          <table:table-cell table:style-name="Tabla43.A1" office:value-type="string">
            <text:p text:style-name="P1" loext:marker-style-name="T16"><text:span text:style-name="T16">%</text:span><text:span text:style-name="T16"/></text:p>
          </table:table-cell>
        </table:table-row>
        <table:table-row table:style-name="Tabla43.1">
          <table:table-cell table:style-name="Tabla43.A2" office:value-type="string">
            <text:p text:style-name="P3" loext:marker-style-name="T16"><text:span text:style-name="T16">Edison Achalma</text:span><text:span text:style-name="T16"/></text:p>
          </table:table-cell>
          <table:table-cell table:style-name="Tabla43.A2" office:value-type="string">
            <text:p text:style-name="P1" loext:marker-style-name="T16"><text:span text:style-name="T16">S/.1,000 </text:span><text:span text:style-name="T16"/></text:p>
          </table:table-cell>
          <table:table-cell table:style-name="Tabla43.A2" office:value-type="string">
            <text:p text:style-name="P1" loext:marker-style-name="T16"><text:span text:style-name="T16">4%</text:span><text:span text:style-name="T16"/></text:p>
          </table:table-cell>
        </table:table-row>
        <table:table-row table:style-name="Tabla43.1">
          <table:table-cell table:style-name="Tabla43.A2" office:value-type="string">
            <text:p text:style-name="P3" loext:marker-style-name="T16"><text:span text:style-name="T16">Diana Gutiérrez</text:span><text:span text:style-name="T16"/></text:p>
          </table:table-cell>
          <table:table-cell table:style-name="Tabla43.A2" office:value-type="string">
            <text:p text:style-name="P1" loext:marker-style-name="T16"><text:span text:style-name="T16">S/.1,000</text:span><text:span text:style-name="T16"/></text:p>
          </table:table-cell>
          <table:table-cell table:style-name="Tabla43.A2" office:value-type="string">
            <text:p text:style-name="P1" loext:marker-style-name="T16"><text:span text:style-name="T16">4%</text:span><text:span text:style-name="T16"/></text:p>
          </table:table-cell>
        </table:table-row>
        <table:table-row table:style-name="Tabla43.1">
          <table:table-cell table:style-name="Tabla43.A2" office:value-type="string">
            <text:p text:style-name="P3" loext:marker-style-name="T16"><text:span text:style-name="T16">Brenda Huiza</text:span><text:span text:style-name="T16"/></text:p>
          </table:table-cell>
          <table:table-cell table:style-name="Tabla43.A2" office:value-type="string">
            <text:p text:style-name="P1" loext:marker-style-name="T16"><text:span text:style-name="T16">S/.1,782</text:span><text:span text:style-name="T16"/></text:p>
          </table:table-cell>
          <table:table-cell table:style-name="Tabla43.A2" office:value-type="string">
            <text:p text:style-name="P1" loext:marker-style-name="T16"><text:span text:style-name="T16">7%</text:span><text:span text:style-name="T16"/></text:p>
          </table:table-cell>
        </table:table-row>
        <table:table-row table:style-name="Tabla43.1">
          <table:table-cell table:style-name="Tabla43.A2" office:value-type="string">
            <text:p text:style-name="P3" loext:marker-style-name="T16"><text:span text:style-name="T16">Carolina Alca</text:span><text:span text:style-name="T16"/></text:p>
          </table:table-cell>
          <table:table-cell table:style-name="Tabla43.A2" office:value-type="string">
            <text:p text:style-name="P1" loext:marker-style-name="T16"><text:span text:style-name="T16">S/.1,000</text:span><text:span text:style-name="T16"/></text:p>
          </table:table-cell>
          <table:table-cell table:style-name="Tabla43.A2" office:value-type="string">
            <text:p text:style-name="P1" loext:marker-style-name="T16"><text:span text:style-name="T16">4%</text:span><text:span text:style-name="T16"/></text:p>
          </table:table-cell>
        </table:table-row>
        <table:table-row table:style-name="Tabla43.1">
          <table:table-cell table:style-name="Tabla43.A2" office:value-type="string">
            <text:p text:style-name="P3" loext:marker-style-name="T16"><text:span text:style-name="T16">Kely Huamán </text:span><text:span text:style-name="T16"/></text:p>
          </table:table-cell>
          <table:table-cell table:style-name="Tabla43.A2" office:value-type="string">
            <text:p text:style-name="P1" loext:marker-style-name="T16"><text:span text:style-name="T16">S/.1,000</text:span><text:span text:style-name="T16"/></text:p>
          </table:table-cell>
          <table:table-cell table:style-name="Tabla43.A2" office:value-type="string">
            <text:p text:style-name="P1" loext:marker-style-name="T16"><text:span text:style-name="T16">4%</text:span><text:span text:style-name="T16"/></text:p>
          </table:table-cell>
        </table:table-row>
        <table:table-row table:style-name="Tabla43.1">
          <table:table-cell table:style-name="Tabla43.A7" office:value-type="string">
            <text:p text:style-name="P3" loext:marker-style-name="T16"><text:span text:style-name="T16">Total</text:span><text:span text:style-name="T16"/></text:p>
          </table:table-cell>
          <table:table-cell table:style-name="Tabla43.A7" office:value-type="string">
            <text:p text:style-name="P1" loext:marker-style-name="T16"><text:span text:style-name="T16">$5,766 </text:span><text:span text:style-name="T16"/></text:p>
          </table:table-cell>
          <table:table-cell table:style-name="Tabla43.A7" office:value-type="string">
            <text:p text:style-name="P1" loext:marker-style-name="T16"><text:span text:style-name="T16">24%</text:span><text:span text:style-name="T16"/></text:p>
          </table:table-cell>
        </table:table-row>
      </table:table>
      <text:p text:style-name="P109" loext:marker-style-name="T4"><text:span text:style-name="T15">Nota</text:span><text:span text:style-name="T4">. Elaboración propia.</text:span></text:p>
      <text:h text:style-name="P78" text:outline-level="2" loext:marker-style-name="T4"><text:bookmark-start text:name="_Toc106699192"/><text:span text:style-name="T4">7.2. Financiamiento de Terceros</text:span><text:bookmark-end text:name="_Toc106699192"/><text:span text:style-name="T4"> </text:span><text:span text:style-name="T4"/></text:h>
      <text:p text:style-name="Standard" loext:marker-style-name="T4"><text:span text:style-name="T4">El crédito para nuestro para nuestra inversión inicial nos lo otorgará la Cooperativa Santa María Magdalena, a nombre del padre de una de nuestras accionistas. El producto del crédito es Credi-personal, el plazo para pagar la deuda es de 3 años, el método aplicado por la Cooperativa es el francés ya que pagaremos una cuota constante de S/.647.34 y un interés total de S/. 5304.15. El préstamo se solicitará el 2 de agosto del 2021.</text:span><text:span text:style-name="T4"/></text:p>
      <table:table table:name="Tabla44" table:style-name="Tabla44">
        <table:table-column table:style-name="Tabla44.A"/>
        <table:table-column table:style-name="Tabla44.B"/>
        <table:table-column table:style-name="Tabla44.C"/>
        <table:table-column table:style-name="Tabla44.D"/>
        <table:table-column table:style-name="Tabla44.E"/>
        <table:table-row table:style-name="Tabla44.1">
          <table:table-cell table:style-name="Tabla44.A1" office:value-type="string">
            <text:p text:style-name="P42" loext:marker-style-name="T16"><text:span text:style-name="T16">Préstamo</text:span><text:span text:style-name="T16"/></text:p>
          </table:table-cell>
          <table:table-cell table:style-name="Tabla44.A1" office:value-type="string">
            <text:p text:style-name="P42" loext:marker-style-name="T16"><text:span text:style-name="T16">S/.18,000.00</text:span><text:span text:style-name="T16"/></text:p>
          </table:table-cell>
          <table:table-cell table:style-name="Tabla44.A1" office:value-type="string">
            <text:p text:style-name="P44" loext:marker-style-name="T16"/>
          </table:table-cell>
          <table:table-cell table:style-name="Tabla44.A1" office:value-type="string">
            <text:p text:style-name="P45" loext:marker-style-name="T4"/>
          </table:table-cell>
          <table:table-cell table:style-name="Tabla44.A1" office:value-type="string">
            <text:p text:style-name="P45" loext:marker-style-name="T4"/>
          </table:table-cell>
        </table:table-row>
        <table:table-row table:style-name="Tabla44.1">
          <table:table-cell table:style-name="Tabla44.A2" office:value-type="string">
            <text:p text:style-name="P42" loext:marker-style-name="T16"><text:span text:style-name="T16">Moneda</text:span><text:span text:style-name="T16"/></text:p>
          </table:table-cell>
          <table:table-cell table:style-name="Tabla44.A2" office:value-type="string">
            <text:p text:style-name="P1" loext:marker-style-name="T16"><text:span text:style-name="T16">Soles</text:span><text:span text:style-name="T16"/></text:p>
          </table:table-cell>
          <table:table-cell table:style-name="Tabla44.A2" office:value-type="string">
            <text:p text:style-name="P46" loext:marker-style-name="T16"/>
          </table:table-cell>
          <table:table-cell table:style-name="Tabla44.A2" office:value-type="string">
            <text:p text:style-name="P49" loext:marker-style-name="T4"/>
          </table:table-cell>
          <table:table-cell table:style-name="Tabla44.A2" office:value-type="string">
            <text:p text:style-name="P49" loext:marker-style-name="T4"/>
          </table:table-cell>
        </table:table-row>
        <table:table-row table:style-name="Tabla44.1">
          <table:table-cell table:style-name="Tabla44.A1" office:value-type="string">
            <text:p text:style-name="P42" loext:marker-style-name="T16"><text:span text:style-name="T16">Número de cuotas</text:span><text:span text:style-name="T16"/></text:p>
          </table:table-cell>
          <table:table-cell table:style-name="Tabla44.A1" office:value-type="string">
            <text:p text:style-name="P1" loext:marker-style-name="T16"><text:span text:style-name="T16">36</text:span><text:span text:style-name="T16"/></text:p>
          </table:table-cell>
          <table:table-cell table:style-name="Tabla44.A1" office:value-type="string">
            <text:p text:style-name="P46" loext:marker-style-name="T16"/>
          </table:table-cell>
          <table:table-cell table:style-name="Tabla44.A1" office:value-type="string">
            <text:p text:style-name="P49" loext:marker-style-name="T4"/>
          </table:table-cell>
          <table:table-cell table:style-name="Tabla44.A1" office:value-type="string">
            <text:p text:style-name="P49" loext:marker-style-name="T4"/>
          </table:table-cell>
        </table:table-row>
        <table:table-row table:style-name="Tabla44.1">
          <table:table-cell table:style-name="Tabla44.A2" office:value-type="string">
            <text:p text:style-name="P42" loext:marker-style-name="T16"><text:span text:style-name="T16">Periodo de pago</text:span><text:span text:style-name="T16"/></text:p>
          </table:table-cell>
          <table:table-cell table:style-name="Tabla44.A2" office:value-type="string">
            <text:p text:style-name="P1" loext:marker-style-name="T16"><text:span text:style-name="T16">Mensual </text:span><text:span text:style-name="T16"/></text:p>
          </table:table-cell>
          <table:table-cell table:style-name="Tabla44.A2" office:value-type="string">
            <text:p text:style-name="P46" loext:marker-style-name="T16"/>
          </table:table-cell>
          <table:table-cell table:style-name="Tabla44.A2" office:value-type="string">
            <text:p text:style-name="P49" loext:marker-style-name="T4"/>
          </table:table-cell>
          <table:table-cell table:style-name="Tabla44.A2" office:value-type="string">
            <text:p text:style-name="P49" loext:marker-style-name="T4"/>
          </table:table-cell>
        </table:table-row>
        <table:table-row table:style-name="Tabla44.1">
          <table:table-cell table:style-name="Tabla44.A1" office:value-type="string">
            <text:p text:style-name="P42" loext:marker-style-name="T16"><text:span text:style-name="T16">TEA nominal (i)</text:span><text:span text:style-name="T16"/></text:p>
          </table:table-cell>
          <table:table-cell table:style-name="Tabla44.A1" office:value-type="string">
            <text:p text:style-name="P1" loext:marker-style-name="T16"><text:span text:style-name="T16">21.50%</text:span><text:span text:style-name="T16"/></text:p>
          </table:table-cell>
          <table:table-cell table:style-name="Tabla44.A1" office:value-type="string">
            <text:p text:style-name="P46" loext:marker-style-name="T16"/>
          </table:table-cell>
          <table:table-cell table:style-name="Tabla44.A1" office:value-type="string">
            <text:p text:style-name="P49" loext:marker-style-name="T4"/>
          </table:table-cell>
          <table:table-cell table:style-name="Tabla44.A1" office:value-type="string">
            <text:p text:style-name="P49" loext:marker-style-name="T4"/>
          </table:table-cell>
        </table:table-row>
        <table:table-row table:style-name="Tabla44.1">
          <table:table-cell table:style-name="Tabla44.A2" office:value-type="string">
            <text:p text:style-name="P42" loext:marker-style-name="T16"><text:span text:style-name="T16">TEM (nominal)</text:span><text:span text:style-name="T16"/></text:p>
          </table:table-cell>
          <table:table-cell table:style-name="Tabla44.A2" office:value-type="string">
            <text:p text:style-name="P1" loext:marker-style-name="T16"><text:span text:style-name="T16">1.64%</text:span><text:span text:style-name="T16"/></text:p>
          </table:table-cell>
          <table:table-cell table:style-name="Tabla44.A2" office:value-type="string">
            <text:p text:style-name="P46" loext:marker-style-name="T16"/>
          </table:table-cell>
          <table:table-cell table:style-name="Tabla44.A2" office:value-type="string">
            <text:p text:style-name="P49" loext:marker-style-name="T4"/>
          </table:table-cell>
          <table:table-cell table:style-name="Tabla44.A2" office:value-type="string">
            <text:p text:style-name="P49" loext:marker-style-name="T4"/>
          </table:table-cell>
        </table:table-row>
        <text:soft-page-break/>
        <table:table-row table:style-name="Tabla44.1">
          <table:table-cell table:style-name="Tabla44.A1" office:value-type="string">
            <text:p text:style-name="P42" loext:marker-style-name="T16"><text:span text:style-name="T16">Inflación anual (proyectado)</text:span><text:span text:style-name="T16"/></text:p>
          </table:table-cell>
          <table:table-cell table:style-name="Tabla44.A1" office:value-type="string">
            <text:p text:style-name="P1" loext:marker-style-name="T16"><text:span text:style-name="T16">2.00%</text:span><text:span text:style-name="T16"/></text:p>
          </table:table-cell>
          <table:table-cell table:style-name="Tabla44.A1" office:value-type="string">
            <text:p text:style-name="P46" loext:marker-style-name="T16"/>
          </table:table-cell>
          <table:table-cell table:style-name="Tabla44.A1" office:value-type="string">
            <text:p text:style-name="P49" loext:marker-style-name="T4"/>
          </table:table-cell>
          <table:table-cell table:style-name="Tabla44.A1" office:value-type="string">
            <text:p text:style-name="P49" loext:marker-style-name="T4"/>
          </table:table-cell>
        </table:table-row>
        <table:table-row table:style-name="Tabla44.1">
          <table:table-cell table:style-name="Tabla44.A2" office:value-type="string">
            <text:p text:style-name="P42" loext:marker-style-name="T16"><text:span text:style-name="T16">Inflación mensual</text:span><text:span text:style-name="T16"/></text:p>
          </table:table-cell>
          <table:table-cell table:style-name="Tabla44.A2" office:value-type="string">
            <text:p text:style-name="P1" loext:marker-style-name="T16"><text:span text:style-name="T16">0.17%</text:span><text:span text:style-name="T16"/></text:p>
          </table:table-cell>
          <table:table-cell table:style-name="Tabla44.A2" office:value-type="string">
            <text:p text:style-name="P46" loext:marker-style-name="T16"/>
          </table:table-cell>
          <table:table-cell table:style-name="Tabla44.A2" office:value-type="string">
            <text:p text:style-name="P49" loext:marker-style-name="T4"/>
          </table:table-cell>
          <table:table-cell table:style-name="Tabla44.A2" office:value-type="string">
            <text:p text:style-name="P49" loext:marker-style-name="T4"/>
          </table:table-cell>
        </table:table-row>
        <table:table-row table:style-name="Tabla44.1">
          <table:table-cell table:style-name="Tabla44.A1" office:value-type="string">
            <text:p text:style-name="P42" loext:marker-style-name="T16"><text:span text:style-name="T16">TEM (real)</text:span><text:span text:style-name="T16"/></text:p>
          </table:table-cell>
          <table:table-cell table:style-name="Tabla44.A1" office:value-type="string">
            <text:p text:style-name="P1" loext:marker-style-name="T16"><text:span text:style-name="T16">1.47%</text:span><text:span text:style-name="T16"/></text:p>
          </table:table-cell>
          <table:table-cell table:style-name="Tabla44.A1" office:value-type="string">
            <text:p text:style-name="P46" loext:marker-style-name="T16"/>
          </table:table-cell>
          <table:table-cell table:style-name="Tabla44.A1" office:value-type="string">
            <text:p text:style-name="P49" loext:marker-style-name="T4"/>
          </table:table-cell>
          <table:table-cell table:style-name="Tabla44.A1" office:value-type="string">
            <text:p text:style-name="P49" loext:marker-style-name="T4"/>
          </table:table-cell>
        </table:table-row>
        <table:table-row table:style-name="Tabla44.1">
          <table:table-cell table:style-name="Tabla44.A2" office:value-type="string">
            <text:p text:style-name="P42" loext:marker-style-name="T16"><text:span text:style-name="T16">Cuota</text:span><text:span text:style-name="T16"/></text:p>
          </table:table-cell>
          <table:table-cell table:style-name="Tabla44.A2" office:value-type="string">
            <text:p text:style-name="P1" loext:marker-style-name="T16"><text:span text:style-name="T16">S/.647.34</text:span><text:span text:style-name="T16"/></text:p>
          </table:table-cell>
          <table:table-cell table:style-name="Tabla44.A2" office:value-type="string">
            <text:p text:style-name="P46" loext:marker-style-name="T16"/>
          </table:table-cell>
          <table:table-cell table:style-name="Tabla44.A2" office:value-type="string">
            <text:p text:style-name="P49" loext:marker-style-name="T4"/>
          </table:table-cell>
          <table:table-cell table:style-name="Tabla44.A2" office:value-type="string">
            <text:p text:style-name="P49" loext:marker-style-name="T4"/>
          </table:table-cell>
        </table:table-row>
        <table:table-row table:style-name="Tabla44.11">
          <table:table-cell table:style-name="Tabla44.A1" office:value-type="string">
            <text:p text:style-name="P42" loext:marker-style-name="T16"><text:span text:style-name="T16">Monto del préstamo </text:span><text:span text:style-name="T16"/></text:p>
          </table:table-cell>
          <table:table-cell table:style-name="Tabla44.A1" office:value-type="string">
            <text:p text:style-name="P1" loext:marker-style-name="T16"><text:span text:style-name="T16">S/.18,000.00</text:span><text:span text:style-name="T16"/></text:p>
          </table:table-cell>
          <table:table-cell table:style-name="Tabla44.A1" office:value-type="string">
            <text:p text:style-name="P46" loext:marker-style-name="T16"/>
          </table:table-cell>
          <table:table-cell table:style-name="Tabla44.A1" office:value-type="string">
            <text:p text:style-name="P49" loext:marker-style-name="T4"/>
          </table:table-cell>
          <table:table-cell table:style-name="Tabla44.A1" office:value-type="string">
            <text:p text:style-name="P49" loext:marker-style-name="T4"/>
          </table:table-cell>
        </table:table-row>
      </table:table>
      <text:p text:style-name="P205" loext:marker-style-name="T4"/>
      <text:p text:style-name="P204" loext:marker-style-name="T14"><text:bookmark-start text:name="_Toc75271106"/><text:bookmark-start text:name="_Toc106698921"/><text:bookmark-start text:name="_Toc75271353"/><text:bookmark-start text:name="_Toc75271204"/><text:span text:style-name="T14">Tabla </text:span><text:bookmark-end text:name="_Toc75271106"/><text:bookmark-end text:name="_Toc106698921"/><text:bookmark-end text:name="_Toc75271353"/><text:bookmark-end text:name="_Toc75271204"/><text:span text:style-name="T14"><text:sequence text:ref-name="refTable22" text:name="Table" text:formula="ooow:Table+1" style:num-format="1">23</text:sequence></text:span><text:span text:style-name="T14"><text:s/></text:span></text:p>
      <text:p text:style-name="P202" loext:marker-style-name="T4"><text:span text:style-name="T4">Amortización de la Deuda, Método Francés.</text:span><text:span text:style-name="T4"/></text:p>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column table:style-name="Tabla46.C"/>
        <table:table-row table:style-name="Tabla46.1">
          <table:table-cell table:style-name="Tabla46.A1" office:value-type="string">
            <text:p text:style-name="P1" loext:marker-style-name="T16"><text:span text:style-name="T16">N°</text:span><text:span text:style-name="T16"/></text:p>
          </table:table-cell>
          <table:table-cell table:style-name="Tabla46.A1" office:value-type="string">
            <text:p text:style-name="P1" loext:marker-style-name="T4"><text:span text:style-name="T16">Fecha</text:span><text:span text:style-name="T16"/></text:p>
          </table:table-cell>
          <table:table-cell table:style-name="Tabla46.A1" office:value-type="string">
            <text:p text:style-name="P1" loext:marker-style-name="T16"><text:span text:style-name="T16">Monto</text:span><text:span text:style-name="T16"/></text:p>
          </table:table-cell>
          <table:table-cell table:style-name="Tabla46.A1" office:value-type="string">
            <text:p text:style-name="P1" loext:marker-style-name="T16"><text:span text:style-name="T16">Interés</text:span><text:span text:style-name="T16"/></text:p>
          </table:table-cell>
          <table:table-cell table:style-name="Tabla46.A1" office:value-type="string">
            <text:p text:style-name="P1" loext:marker-style-name="T16"><text:span text:style-name="T16">Amortización</text:span><text:span text:style-name="T16"/></text:p>
          </table:table-cell>
          <table:table-cell table:style-name="Tabla46.A1" office:value-type="string">
            <text:p text:style-name="P1" loext:marker-style-name="T16"><text:span text:style-name="T16">Cuota</text:span><text:span text:style-name="T16"/></text:p>
          </table:table-cell>
          <table:table-cell table:style-name="Tabla46.A1" office:value-type="string">
            <text:p text:style-name="P1" loext:marker-style-name="T16"><text:span text:style-name="T16">Saldo final</text:span><text:span text:style-name="T16"/></text:p>
          </table:table-cell>
        </table:table-row>
        <table:table-row table:style-name="Tabla46.2">
          <table:table-cell table:style-name="Tabla46.A2" office:value-type="string">
            <text:p text:style-name="P46" loext:marker-style-name="T16"/>
          </table:table-cell>
          <table:table-cell table:style-name="Tabla46.A2" office:value-type="string">
            <text:p text:style-name="P1" loext:marker-style-name="T16"><text:span text:style-name="T16">08/2/2021</text:span><text:span text:style-name="T16"/></text:p>
          </table:table-cell>
          <table:table-cell table:style-name="Tabla46.A2" office:value-type="string">
            <text:p text:style-name="P1" loext:marker-style-name="T16"><text:span text:style-name="T16">18000.00</text:span><text:span text:style-name="T16"/></text:p>
          </table:table-cell>
          <table:table-cell table:style-name="Tabla46.A2" office:value-type="string">
            <text:p text:style-name="P1" loext:marker-style-name="T16"><text:span text:style-name="T16">0.00</text:span><text:span text:style-name="T16"/></text:p>
          </table:table-cell>
          <table:table-cell table:style-name="Tabla46.A2" office:value-type="string">
            <text:p text:style-name="P1" loext:marker-style-name="T16"><text:span text:style-name="T16">0.00</text:span><text:span text:style-name="T16"/></text:p>
          </table:table-cell>
          <table:table-cell table:style-name="Tabla46.A2" office:value-type="string">
            <text:p text:style-name="P1" loext:marker-style-name="T16"><text:span text:style-name="T16">0.00</text:span><text:span text:style-name="T16"/></text:p>
          </table:table-cell>
          <table:table-cell table:style-name="Tabla46.A2" office:value-type="string">
            <text:p text:style-name="P1" loext:marker-style-name="T16"><text:span text:style-name="T16">18000.00</text:span><text:span text:style-name="T16"/></text:p>
          </table:table-cell>
        </table:table-row>
        <table:table-row table:style-name="Tabla46.2">
          <table:table-cell table:style-name="Tabla46.A2" office:value-type="string">
            <text:p text:style-name="P1" loext:marker-style-name="T16"><text:span text:style-name="T16">1</text:span><text:span text:style-name="T16"/></text:p>
          </table:table-cell>
          <table:table-cell table:style-name="Tabla46.A2" office:value-type="string">
            <text:p text:style-name="P1" loext:marker-style-name="T16"><text:span text:style-name="T16">09/1/2021</text:span><text:span text:style-name="T16"/></text:p>
          </table:table-cell>
          <table:table-cell table:style-name="Tabla46.A2" office:value-type="string">
            <text:p text:style-name="P1" loext:marker-style-name="T16"><text:span text:style-name="T16">18000.00</text:span><text:span text:style-name="T16"/></text:p>
          </table:table-cell>
          <table:table-cell table:style-name="Tabla46.A2" office:value-type="string">
            <text:p text:style-name="P1" loext:marker-style-name="T16"><text:span text:style-name="T16">264.33</text:span><text:span text:style-name="T16"/></text:p>
          </table:table-cell>
          <table:table-cell table:style-name="Tabla46.A2" office:value-type="string">
            <text:p text:style-name="P1" loext:marker-style-name="T16"><text:span text:style-name="T16">383.00</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7617.00</text:span><text:span text:style-name="T16"/></text:p>
            <text:p text:style-name="P53" loext:marker-style-name="T13"/>
          </table:table-cell>
        </table:table-row>
        <table:table-row table:style-name="Tabla46.2">
          <table:table-cell table:style-name="Tabla46.A2" office:value-type="string">
            <text:p text:style-name="P1" loext:marker-style-name="T16"><text:span text:style-name="T16">2</text:span><text:span text:style-name="T16"/></text:p>
          </table:table-cell>
          <table:table-cell table:style-name="Tabla46.A2" office:value-type="string">
            <text:p text:style-name="P1" loext:marker-style-name="T16"><text:span text:style-name="T16">10/1/2021</text:span><text:span text:style-name="T16"/></text:p>
          </table:table-cell>
          <table:table-cell table:style-name="Tabla46.A2" office:value-type="string">
            <text:p text:style-name="P1" loext:marker-style-name="T16"><text:span text:style-name="T16">17617.00</text:span><text:span text:style-name="T16"/></text:p>
          </table:table-cell>
          <table:table-cell table:style-name="Tabla46.A2" office:value-type="string">
            <text:p text:style-name="P1" loext:marker-style-name="T16"><text:span text:style-name="T16">258.71</text:span><text:span text:style-name="T16"/></text:p>
          </table:table-cell>
          <table:table-cell table:style-name="Tabla46.A2" office:value-type="string">
            <text:p text:style-name="P1" loext:marker-style-name="T16"><text:span text:style-name="T16">388.6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7228.37</text:span><text:span text:style-name="T16"/></text:p>
          </table:table-cell>
        </table:table-row>
        <table:table-row table:style-name="Tabla46.2">
          <table:table-cell table:style-name="Tabla46.A2" office:value-type="string">
            <text:p text:style-name="P1" loext:marker-style-name="T16"><text:span text:style-name="T16">3</text:span><text:span text:style-name="T16"/></text:p>
          </table:table-cell>
          <table:table-cell table:style-name="Tabla46.A2" office:value-type="string">
            <text:p text:style-name="P1" loext:marker-style-name="T16"><text:span text:style-name="T16">10/31/2021</text:span><text:span text:style-name="T16"/></text:p>
          </table:table-cell>
          <table:table-cell table:style-name="Tabla46.A2" office:value-type="string">
            <text:p text:style-name="P1" loext:marker-style-name="T16"><text:span text:style-name="T16">17228.37</text:span><text:span text:style-name="T16"/></text:p>
          </table:table-cell>
          <table:table-cell table:style-name="Tabla46.A2" office:value-type="string">
            <text:p text:style-name="P1" loext:marker-style-name="T16"><text:span text:style-name="T16">253.00</text:span><text:span text:style-name="T16"/></text:p>
          </table:table-cell>
          <table:table-cell table:style-name="Tabla46.A2" office:value-type="string">
            <text:p text:style-name="P1" loext:marker-style-name="T16"><text:span text:style-name="T16">394.3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6834.03</text:span><text:span text:style-name="T16"/></text:p>
          </table:table-cell>
        </table:table-row>
        <table:table-row table:style-name="Tabla46.2">
          <table:table-cell table:style-name="Tabla46.A2" office:value-type="string">
            <text:p text:style-name="P1" loext:marker-style-name="T16"><text:span text:style-name="T16">4</text:span><text:span text:style-name="T16"/></text:p>
          </table:table-cell>
          <table:table-cell table:style-name="Tabla46.A2" office:value-type="string">
            <text:p text:style-name="P1" loext:marker-style-name="T16"><text:span text:style-name="T16">11/30/2021</text:span><text:span text:style-name="T16"/></text:p>
          </table:table-cell>
          <table:table-cell table:style-name="Tabla46.A2" office:value-type="string">
            <text:p text:style-name="P1" loext:marker-style-name="T16"><text:span text:style-name="T16">16834.03</text:span><text:span text:style-name="T16"/></text:p>
          </table:table-cell>
          <table:table-cell table:style-name="Tabla46.A2" office:value-type="string">
            <text:p text:style-name="P1" loext:marker-style-name="T16"><text:span text:style-name="T16">247.21</text:span><text:span text:style-name="T16"/></text:p>
          </table:table-cell>
          <table:table-cell table:style-name="Tabla46.A2" office:value-type="string">
            <text:p text:style-name="P1" loext:marker-style-name="T16"><text:span text:style-name="T16">400.1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6433.91</text:span><text:span text:style-name="T16"/></text:p>
          </table:table-cell>
        </table:table-row>
        <table:table-row table:style-name="Tabla46.2">
          <table:table-cell table:style-name="Tabla46.A2" office:value-type="string">
            <text:p text:style-name="P1" loext:marker-style-name="T16"><text:span text:style-name="T16">5</text:span><text:span text:style-name="T16"/></text:p>
          </table:table-cell>
          <table:table-cell table:style-name="Tabla46.A2" office:value-type="string">
            <text:p text:style-name="P1" loext:marker-style-name="T16"><text:span text:style-name="T16">12/30/2021</text:span><text:span text:style-name="T16"/></text:p>
          </table:table-cell>
          <table:table-cell table:style-name="Tabla46.A2" office:value-type="string">
            <text:p text:style-name="P1" loext:marker-style-name="T16"><text:span text:style-name="T16">16433.91</text:span><text:span text:style-name="T16"/></text:p>
          </table:table-cell>
          <table:table-cell table:style-name="Tabla46.A2" office:value-type="string">
            <text:p text:style-name="P1" loext:marker-style-name="T16"><text:span text:style-name="T16">241.34</text:span><text:span text:style-name="T16"/></text:p>
          </table:table-cell>
          <table:table-cell table:style-name="Tabla46.A2" office:value-type="string">
            <text:p text:style-name="P1" loext:marker-style-name="T16"><text:span text:style-name="T16">406.00</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6027.91</text:span><text:span text:style-name="T16"/></text:p>
          </table:table-cell>
        </table:table-row>
        <table:table-row table:style-name="Tabla46.2">
          <table:table-cell table:style-name="Tabla46.A2" office:value-type="string">
            <text:p text:style-name="P1" loext:marker-style-name="T16"><text:span text:style-name="T16">6</text:span><text:span text:style-name="T16"/></text:p>
          </table:table-cell>
          <table:table-cell table:style-name="Tabla46.A2" office:value-type="string">
            <text:p text:style-name="P1" loext:marker-style-name="T16"><text:span text:style-name="T16">01/2</text:span><text:soft-page-break/><text:span text:style-name="T16">9/2022</text:span><text:span text:style-name="T16"/></text:p>
          </table:table-cell>
          <table:table-cell table:style-name="Tabla46.A2" office:value-type="string">
            <text:p text:style-name="P1" loext:marker-style-name="T16"><text:span text:style-name="T16">16</text:span><text:soft-page-break/><text:span text:style-name="T16">027.91</text:span><text:span text:style-name="T16"/></text:p>
          </table:table-cell>
          <table:table-cell table:style-name="Tabla46.A2" office:value-type="string">
            <text:p text:style-name="P1" loext:marker-style-name="T16"><text:span text:style-name="T16">23</text:span><text:soft-page-break/><text:span text:style-name="T16">5.37</text:span><text:span text:style-name="T16"/></text:p>
          </table:table-cell>
          <table:table-cell table:style-name="Tabla46.A2" office:value-type="string">
            <text:p text:style-name="P1" loext:marker-style-name="T16"><text:span text:style-name="T16">411.9</text:span><text:soft-page-break/><text:span text:style-name="T16">6</text:span><text:span text:style-name="T16"/></text:p>
          </table:table-cell>
          <table:table-cell table:style-name="Tabla46.A2" office:value-type="string">
            <text:p text:style-name="P1" loext:marker-style-name="T16"><text:span text:style-name="T16">6</text:span><text:soft-page-break/><text:span text:style-name="T16">47.34</text:span><text:span text:style-name="T16"/></text:p>
          </table:table-cell>
          <table:table-cell table:style-name="Tabla46.A2" office:value-type="string">
            <text:p text:style-name="P1" loext:marker-style-name="T16"><text:span text:style-name="T16">15</text:span><text:soft-page-break/><text:span text:style-name="T16">615.94</text:span><text:span text:style-name="T16"/></text:p>
          </table:table-cell>
        </table:table-row>
        <table:table-row table:style-name="Tabla46.2">
          <table:table-cell table:style-name="Tabla46.A2" office:value-type="string">
            <text:p text:style-name="P1" loext:marker-style-name="T16"><text:span text:style-name="T16">7</text:span><text:span text:style-name="T16"/></text:p>
          </table:table-cell>
          <table:table-cell table:style-name="Tabla46.A2" office:value-type="string">
            <text:p text:style-name="P1" loext:marker-style-name="T16"><text:span text:style-name="T16">02/28/2022</text:span><text:span text:style-name="T16"/></text:p>
          </table:table-cell>
          <table:table-cell table:style-name="Tabla46.A2" office:value-type="string">
            <text:p text:style-name="P1" loext:marker-style-name="T16"><text:span text:style-name="T16">15615.94</text:span><text:span text:style-name="T16"/></text:p>
          </table:table-cell>
          <table:table-cell table:style-name="Tabla46.A2" office:value-type="string">
            <text:p text:style-name="P1" loext:marker-style-name="T16"><text:span text:style-name="T16">229.32</text:span><text:span text:style-name="T16"/></text:p>
          </table:table-cell>
          <table:table-cell table:style-name="Tabla46.A2" office:value-type="string">
            <text:p text:style-name="P1" loext:marker-style-name="T16"><text:span text:style-name="T16">418.01</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5197.93</text:span><text:span text:style-name="T16"/></text:p>
          </table:table-cell>
        </table:table-row>
        <table:table-row table:style-name="Tabla46.2">
          <table:table-cell table:style-name="Tabla46.A2" office:value-type="string">
            <text:p text:style-name="P1" loext:marker-style-name="T16"><text:span text:style-name="T16">8</text:span><text:span text:style-name="T16"/></text:p>
          </table:table-cell>
          <table:table-cell table:style-name="Tabla46.A2" office:value-type="string">
            <text:p text:style-name="P1" loext:marker-style-name="T16"><text:span text:style-name="T16">03/30/2022</text:span><text:span text:style-name="T16"/></text:p>
          </table:table-cell>
          <table:table-cell table:style-name="Tabla46.A2" office:value-type="string">
            <text:p text:style-name="P1" loext:marker-style-name="T16"><text:span text:style-name="T16">15197.93</text:span><text:span text:style-name="T16"/></text:p>
          </table:table-cell>
          <table:table-cell table:style-name="Tabla46.A2" office:value-type="string">
            <text:p text:style-name="P1" loext:marker-style-name="T16"><text:span text:style-name="T16">223.19</text:span><text:span text:style-name="T16"/></text:p>
          </table:table-cell>
          <table:table-cell table:style-name="Tabla46.A2" office:value-type="string">
            <text:p text:style-name="P1" loext:marker-style-name="T16"><text:span text:style-name="T16">424.15</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4773.78</text:span><text:span text:style-name="T16"/></text:p>
          </table:table-cell>
        </table:table-row>
        <table:table-row table:style-name="Tabla46.2">
          <table:table-cell table:style-name="Tabla46.A2" office:value-type="string">
            <text:p text:style-name="P1" loext:marker-style-name="T16"><text:span text:style-name="T16">9</text:span><text:span text:style-name="T16"/></text:p>
          </table:table-cell>
          <table:table-cell table:style-name="Tabla46.A2" office:value-type="string">
            <text:p text:style-name="P1" loext:marker-style-name="T16"><text:span text:style-name="T16">04/29/2022</text:span><text:span text:style-name="T16"/></text:p>
          </table:table-cell>
          <table:table-cell table:style-name="Tabla46.A2" office:value-type="string">
            <text:p text:style-name="P1" loext:marker-style-name="T16"><text:span text:style-name="T16">14773.78</text:span><text:span text:style-name="T16"/></text:p>
          </table:table-cell>
          <table:table-cell table:style-name="Tabla46.A2" office:value-type="string">
            <text:p text:style-name="P1" loext:marker-style-name="T16"><text:span text:style-name="T16">216.96</text:span><text:span text:style-name="T16"/></text:p>
          </table:table-cell>
          <table:table-cell table:style-name="Tabla46.A2" office:value-type="string">
            <text:p text:style-name="P1" loext:marker-style-name="T16"><text:span text:style-name="T16">430.38</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4343.40</text:span><text:span text:style-name="T16"/></text:p>
          </table:table-cell>
        </table:table-row>
        <table:table-row table:style-name="Tabla46.2">
          <table:table-cell table:style-name="Tabla46.A2" office:value-type="string">
            <text:p text:style-name="P1" loext:marker-style-name="T16"><text:span text:style-name="T16">10</text:span><text:span text:style-name="T16"/></text:p>
          </table:table-cell>
          <table:table-cell table:style-name="Tabla46.A2" office:value-type="string">
            <text:p text:style-name="P1" loext:marker-style-name="T16"><text:span text:style-name="T16">05/29/2022</text:span><text:span text:style-name="T16"/></text:p>
          </table:table-cell>
          <table:table-cell table:style-name="Tabla46.A2" office:value-type="string">
            <text:p text:style-name="P1" loext:marker-style-name="T16"><text:span text:style-name="T16">14343.40</text:span><text:span text:style-name="T16"/></text:p>
          </table:table-cell>
          <table:table-cell table:style-name="Tabla46.A2" office:value-type="string">
            <text:p text:style-name="P1" loext:marker-style-name="T16"><text:span text:style-name="T16">210.64</text:span><text:span text:style-name="T16"/></text:p>
          </table:table-cell>
          <table:table-cell table:style-name="Tabla46.A2" office:value-type="string">
            <text:p text:style-name="P1" loext:marker-style-name="T16"><text:span text:style-name="T16">436.70</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3906.69</text:span><text:span text:style-name="T16"/></text:p>
          </table:table-cell>
        </table:table-row>
        <table:table-row table:style-name="Tabla46.2">
          <table:table-cell table:style-name="Tabla46.A2" office:value-type="string">
            <text:p text:style-name="P1" loext:marker-style-name="T16"><text:span text:style-name="T16">11</text:span><text:span text:style-name="T16"/></text:p>
          </table:table-cell>
          <table:table-cell table:style-name="Tabla46.A2" office:value-type="string">
            <text:p text:style-name="P1" loext:marker-style-name="T16"><text:span text:style-name="T16">06/28/2022</text:span><text:span text:style-name="T16"/></text:p>
          </table:table-cell>
          <table:table-cell table:style-name="Tabla46.A2" office:value-type="string">
            <text:p text:style-name="P1" loext:marker-style-name="T16"><text:span text:style-name="T16">13906.69</text:span><text:span text:style-name="T16"/></text:p>
          </table:table-cell>
          <table:table-cell table:style-name="Tabla46.A2" office:value-type="string">
            <text:p text:style-name="P1" loext:marker-style-name="T16"><text:span text:style-name="T16">204.22</text:span><text:span text:style-name="T16"/></text:p>
          </table:table-cell>
          <table:table-cell table:style-name="Tabla46.A2" office:value-type="string">
            <text:p text:style-name="P1" loext:marker-style-name="T16"><text:span text:style-name="T16">443.11</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3463.58</text:span><text:span text:style-name="T16"/></text:p>
          </table:table-cell>
        </table:table-row>
        <table:table-row table:style-name="Tabla46.2">
          <table:table-cell table:style-name="Tabla46.A2" office:value-type="string">
            <text:p text:style-name="P1" loext:marker-style-name="T16"><text:span text:style-name="T16">12</text:span><text:span text:style-name="T16"/></text:p>
          </table:table-cell>
          <table:table-cell table:style-name="Tabla46.A2" office:value-type="string">
            <text:p text:style-name="P1" loext:marker-style-name="T16"><text:span text:style-name="T16">07/28/2022</text:span><text:span text:style-name="T16"/></text:p>
          </table:table-cell>
          <table:table-cell table:style-name="Tabla46.A2" office:value-type="string">
            <text:p text:style-name="P1" loext:marker-style-name="T16"><text:span text:style-name="T16">13463.58</text:span><text:span text:style-name="T16"/></text:p>
          </table:table-cell>
          <table:table-cell table:style-name="Tabla46.A2" office:value-type="string">
            <text:p text:style-name="P1" loext:marker-style-name="T16"><text:span text:style-name="T16">197.72</text:span><text:span text:style-name="T16"/></text:p>
          </table:table-cell>
          <table:table-cell table:style-name="Tabla46.A2" office:value-type="string">
            <text:p text:style-name="P1" loext:marker-style-name="T16"><text:span text:style-name="T16">449.6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3013.96</text:span><text:span text:style-name="T16"/></text:p>
          </table:table-cell>
        </table:table-row>
        <table:table-row table:style-name="Tabla46.2">
          <table:table-cell table:style-name="Tabla46.A2" office:value-type="string">
            <text:p text:style-name="P1" loext:marker-style-name="T16"><text:span text:style-name="T16">13</text:span><text:span text:style-name="T16"/></text:p>
          </table:table-cell>
          <table:table-cell table:style-name="Tabla46.A2" office:value-type="string">
            <text:p text:style-name="P1" loext:marker-style-name="T16"><text:span text:style-name="T16">08/27/2022</text:span><text:span text:style-name="T16"/></text:p>
          </table:table-cell>
          <table:table-cell table:style-name="Tabla46.A2" office:value-type="string">
            <text:p text:style-name="P1" loext:marker-style-name="T16"><text:span text:style-name="T16">13013.96</text:span><text:span text:style-name="T16"/></text:p>
          </table:table-cell>
          <table:table-cell table:style-name="Tabla46.A2" office:value-type="string">
            <text:p text:style-name="P1" loext:marker-style-name="T16"><text:span text:style-name="T16">191.11</text:span><text:span text:style-name="T16"/></text:p>
          </table:table-cell>
          <table:table-cell table:style-name="Tabla46.A2" office:value-type="string">
            <text:p text:style-name="P1" loext:marker-style-name="T16"><text:span text:style-name="T16">456.2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2557.73</text:span><text:span text:style-name="T16"/></text:p>
          </table:table-cell>
        </table:table-row>
        <table:table-row table:style-name="Tabla46.2">
          <table:table-cell table:style-name="Tabla46.A2" office:value-type="string">
            <text:p text:style-name="P1" loext:marker-style-name="T16"><text:span text:style-name="T16">14</text:span><text:span text:style-name="T16"/></text:p>
          </table:table-cell>
          <table:table-cell table:style-name="Tabla46.A2" office:value-type="string">
            <text:p text:style-name="P1" loext:marker-style-name="T16"><text:span text:style-name="T16">09/26/2022</text:span><text:span text:style-name="T16"/></text:p>
          </table:table-cell>
          <table:table-cell table:style-name="Tabla46.A2" office:value-type="string">
            <text:p text:style-name="P1" loext:marker-style-name="T16"><text:span text:style-name="T16">12557.73</text:span><text:span text:style-name="T16"/></text:p>
          </table:table-cell>
          <table:table-cell table:style-name="Tabla46.A2" office:value-type="string">
            <text:p text:style-name="P1" loext:marker-style-name="T16"><text:span text:style-name="T16">184.41</text:span><text:span text:style-name="T16"/></text:p>
          </table:table-cell>
          <table:table-cell table:style-name="Tabla46.A2" office:value-type="string">
            <text:p text:style-name="P1" loext:marker-style-name="T16"><text:span text:style-name="T16">462.9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2094.81</text:span><text:span text:style-name="T16"/></text:p>
          </table:table-cell>
        </table:table-row>
        <table:table-row table:style-name="Tabla46.2">
          <table:table-cell table:style-name="Tabla46.A2" office:value-type="string">
            <text:p text:style-name="P1" loext:marker-style-name="T16"><text:span text:style-name="T16">15</text:span><text:span text:style-name="T16"/></text:p>
          </table:table-cell>
          <table:table-cell table:style-name="Tabla46.A2" office:value-type="string">
            <text:p text:style-name="P1" loext:marker-style-name="T16"><text:span text:style-name="T16">10/26/2022</text:span><text:span text:style-name="T16"/></text:p>
          </table:table-cell>
          <table:table-cell table:style-name="Tabla46.A2" office:value-type="string">
            <text:p text:style-name="P1" loext:marker-style-name="T16"><text:span text:style-name="T16">12094.81</text:span><text:span text:style-name="T16"/></text:p>
          </table:table-cell>
          <table:table-cell table:style-name="Tabla46.A2" office:value-type="string">
            <text:p text:style-name="P1" loext:marker-style-name="T16"><text:span text:style-name="T16">177.62</text:span><text:span text:style-name="T16"/></text:p>
          </table:table-cell>
          <table:table-cell table:style-name="Tabla46.A2" office:value-type="string">
            <text:p text:style-name="P1" loext:marker-style-name="T16"><text:span text:style-name="T16">469.7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1625.09</text:span><text:span text:style-name="T16"/></text:p>
          </table:table-cell>
        </table:table-row>
        <text:soft-page-break/>
        <table:table-row table:style-name="Tabla46.2">
          <table:table-cell table:style-name="Tabla46.A2" office:value-type="string">
            <text:p text:style-name="P1" loext:marker-style-name="T16"><text:span text:style-name="T16">16</text:span><text:span text:style-name="T16"/></text:p>
          </table:table-cell>
          <table:table-cell table:style-name="Tabla46.A2" office:value-type="string">
            <text:p text:style-name="P1" loext:marker-style-name="T16"><text:span text:style-name="T16">11/25/2022</text:span><text:span text:style-name="T16"/></text:p>
          </table:table-cell>
          <table:table-cell table:style-name="Tabla46.A2" office:value-type="string">
            <text:p text:style-name="P1" loext:marker-style-name="T16"><text:span text:style-name="T16">11625.09</text:span><text:span text:style-name="T16"/></text:p>
          </table:table-cell>
          <table:table-cell table:style-name="Tabla46.A2" office:value-type="string">
            <text:p text:style-name="P1" loext:marker-style-name="T16"><text:span text:style-name="T16">170.72</text:span><text:span text:style-name="T16"/></text:p>
          </table:table-cell>
          <table:table-cell table:style-name="Tabla46.A2" office:value-type="string">
            <text:p text:style-name="P1" loext:marker-style-name="T16"><text:span text:style-name="T16">476.6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1148.47</text:span><text:span text:style-name="T16"/></text:p>
          </table:table-cell>
        </table:table-row>
        <table:table-row table:style-name="Tabla46.2">
          <table:table-cell table:style-name="Tabla46.A2" office:value-type="string">
            <text:p text:style-name="P1" loext:marker-style-name="T16"><text:span text:style-name="T16">17</text:span><text:span text:style-name="T16"/></text:p>
          </table:table-cell>
          <table:table-cell table:style-name="Tabla46.A2" office:value-type="string">
            <text:p text:style-name="P1" loext:marker-style-name="T16"><text:span text:style-name="T16">12/25/2022</text:span><text:span text:style-name="T16"/></text:p>
          </table:table-cell>
          <table:table-cell table:style-name="Tabla46.A2" office:value-type="string">
            <text:p text:style-name="P1" loext:marker-style-name="T16"><text:span text:style-name="T16">11148.47</text:span><text:span text:style-name="T16"/></text:p>
          </table:table-cell>
          <table:table-cell table:style-name="Tabla46.A2" office:value-type="string">
            <text:p text:style-name="P1" loext:marker-style-name="T16"><text:span text:style-name="T16">163.72</text:span><text:span text:style-name="T16"/></text:p>
          </table:table-cell>
          <table:table-cell table:style-name="Tabla46.A2" office:value-type="string">
            <text:p text:style-name="P1" loext:marker-style-name="T16"><text:span text:style-name="T16">483.6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0664.85</text:span><text:span text:style-name="T16"/></text:p>
          </table:table-cell>
        </table:table-row>
        <table:table-row table:style-name="Tabla46.2">
          <table:table-cell table:style-name="Tabla46.A2" office:value-type="string">
            <text:p text:style-name="P1" loext:marker-style-name="T16"><text:span text:style-name="T16">18</text:span><text:span text:style-name="T16"/></text:p>
          </table:table-cell>
          <table:table-cell table:style-name="Tabla46.A2" office:value-type="string">
            <text:p text:style-name="P1" loext:marker-style-name="T16"><text:span text:style-name="T16">01/24/2023</text:span><text:span text:style-name="T16"/></text:p>
          </table:table-cell>
          <table:table-cell table:style-name="Tabla46.A2" office:value-type="string">
            <text:p text:style-name="P1" loext:marker-style-name="T16"><text:span text:style-name="T16">10664.85</text:span><text:span text:style-name="T16"/></text:p>
          </table:table-cell>
          <table:table-cell table:style-name="Tabla46.A2" office:value-type="string">
            <text:p text:style-name="P1" loext:marker-style-name="T16"><text:span text:style-name="T16">156.62</text:span><text:span text:style-name="T16"/></text:p>
          </table:table-cell>
          <table:table-cell table:style-name="Tabla46.A2" office:value-type="string">
            <text:p text:style-name="P1" loext:marker-style-name="T16"><text:span text:style-name="T16">490.7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0174.12</text:span><text:span text:style-name="T16"/></text:p>
          </table:table-cell>
        </table:table-row>
        <table:table-row table:style-name="Tabla46.2">
          <table:table-cell table:style-name="Tabla46.A2" office:value-type="string">
            <text:p text:style-name="P1" loext:marker-style-name="T16"><text:span text:style-name="T16">19</text:span><text:span text:style-name="T16"/></text:p>
          </table:table-cell>
          <table:table-cell table:style-name="Tabla46.A2" office:value-type="string">
            <text:p text:style-name="P1" loext:marker-style-name="T16"><text:span text:style-name="T16">02/23/2023</text:span><text:span text:style-name="T16"/></text:p>
          </table:table-cell>
          <table:table-cell table:style-name="Tabla46.A2" office:value-type="string">
            <text:p text:style-name="P1" loext:marker-style-name="T16"><text:span text:style-name="T16">10174.12</text:span><text:span text:style-name="T16"/></text:p>
          </table:table-cell>
          <table:table-cell table:style-name="Tabla46.A2" office:value-type="string">
            <text:p text:style-name="P1" loext:marker-style-name="T16"><text:span text:style-name="T16">149.41</text:span><text:span text:style-name="T16"/></text:p>
          </table:table-cell>
          <table:table-cell table:style-name="Tabla46.A2" office:value-type="string">
            <text:p text:style-name="P1" loext:marker-style-name="T16"><text:span text:style-name="T16">497.9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9676.20</text:span><text:span text:style-name="T16"/></text:p>
          </table:table-cell>
        </table:table-row>
        <table:table-row table:style-name="Tabla46.2">
          <table:table-cell table:style-name="Tabla46.A2" office:value-type="string">
            <text:p text:style-name="P1" loext:marker-style-name="T16"><text:span text:style-name="T16">20</text:span><text:span text:style-name="T16"/></text:p>
          </table:table-cell>
          <table:table-cell table:style-name="Tabla46.A2" office:value-type="string">
            <text:p text:style-name="P1" loext:marker-style-name="T16"><text:span text:style-name="T16">03/25/2023</text:span><text:span text:style-name="T16"/></text:p>
          </table:table-cell>
          <table:table-cell table:style-name="Tabla46.A2" office:value-type="string">
            <text:p text:style-name="P1" loext:marker-style-name="T16"><text:span text:style-name="T16">9676.20</text:span><text:span text:style-name="T16"/></text:p>
          </table:table-cell>
          <table:table-cell table:style-name="Tabla46.A2" office:value-type="string">
            <text:p text:style-name="P1" loext:marker-style-name="T16"><text:span text:style-name="T16">142.10</text:span><text:span text:style-name="T16"/></text:p>
          </table:table-cell>
          <table:table-cell table:style-name="Tabla46.A2" office:value-type="string">
            <text:p text:style-name="P1" loext:marker-style-name="T16"><text:span text:style-name="T16">505.24</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9170.96</text:span><text:span text:style-name="T16"/></text:p>
          </table:table-cell>
        </table:table-row>
        <table:table-row table:style-name="Tabla46.2">
          <table:table-cell table:style-name="Tabla46.A2" office:value-type="string">
            <text:p text:style-name="P1" loext:marker-style-name="T16"><text:span text:style-name="T16">21</text:span><text:span text:style-name="T16"/></text:p>
          </table:table-cell>
          <table:table-cell table:style-name="Tabla46.A2" office:value-type="string">
            <text:p text:style-name="P1" loext:marker-style-name="T16"><text:span text:style-name="T16">04/24/2023</text:span><text:span text:style-name="T16"/></text:p>
          </table:table-cell>
          <table:table-cell table:style-name="Tabla46.A2" office:value-type="string">
            <text:p text:style-name="P1" loext:marker-style-name="T16"><text:span text:style-name="T16">9170.96</text:span><text:span text:style-name="T16"/></text:p>
          </table:table-cell>
          <table:table-cell table:style-name="Tabla46.A2" office:value-type="string">
            <text:p text:style-name="P1" loext:marker-style-name="T16"><text:span text:style-name="T16">134.68</text:span><text:span text:style-name="T16"/></text:p>
          </table:table-cell>
          <table:table-cell table:style-name="Tabla46.A2" office:value-type="string">
            <text:p text:style-name="P1" loext:marker-style-name="T16"><text:span text:style-name="T16">512.66</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8658.30</text:span><text:span text:style-name="T16"/></text:p>
          </table:table-cell>
        </table:table-row>
        <table:table-row table:style-name="Tabla46.2">
          <table:table-cell table:style-name="Tabla46.A2" office:value-type="string">
            <text:p text:style-name="P1" loext:marker-style-name="T16"><text:span text:style-name="T16">22</text:span><text:span text:style-name="T16"/></text:p>
          </table:table-cell>
          <table:table-cell table:style-name="Tabla46.A2" office:value-type="string">
            <text:p text:style-name="P1" loext:marker-style-name="T16"><text:span text:style-name="T16">05/24/2023</text:span><text:span text:style-name="T16"/></text:p>
          </table:table-cell>
          <table:table-cell table:style-name="Tabla46.A2" office:value-type="string">
            <text:p text:style-name="P1" loext:marker-style-name="T16"><text:span text:style-name="T16">8658.30</text:span><text:span text:style-name="T16"/></text:p>
          </table:table-cell>
          <table:table-cell table:style-name="Tabla46.A2" office:value-type="string">
            <text:p text:style-name="P1" loext:marker-style-name="T16"><text:span text:style-name="T16">127.15</text:span><text:span text:style-name="T16"/></text:p>
          </table:table-cell>
          <table:table-cell table:style-name="Tabla46.A2" office:value-type="string">
            <text:p text:style-name="P1" loext:marker-style-name="T16"><text:span text:style-name="T16">520.19</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8138.11</text:span><text:span text:style-name="T16"/></text:p>
          </table:table-cell>
        </table:table-row>
        <table:table-row table:style-name="Tabla46.2">
          <table:table-cell table:style-name="Tabla46.A2" office:value-type="string">
            <text:p text:style-name="P1" loext:marker-style-name="T16"><text:span text:style-name="T16">23</text:span><text:span text:style-name="T16"/></text:p>
          </table:table-cell>
          <table:table-cell table:style-name="Tabla46.A2" office:value-type="string">
            <text:p text:style-name="P1" loext:marker-style-name="T16"><text:span text:style-name="T16">6/23/2023</text:span><text:span text:style-name="T16"/></text:p>
          </table:table-cell>
          <table:table-cell table:style-name="Tabla46.A2" office:value-type="string">
            <text:p text:style-name="P1" loext:marker-style-name="T16"><text:span text:style-name="T16">8138.11</text:span><text:span text:style-name="T16"/></text:p>
          </table:table-cell>
          <table:table-cell table:style-name="Tabla46.A2" office:value-type="string">
            <text:p text:style-name="P1" loext:marker-style-name="T16"><text:span text:style-name="T16">119.51</text:span><text:span text:style-name="T16"/></text:p>
          </table:table-cell>
          <table:table-cell table:style-name="Tabla46.A2" office:value-type="string">
            <text:p text:style-name="P1" loext:marker-style-name="T16"><text:span text:style-name="T16">527.8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7610.28</text:span><text:span text:style-name="T16"/></text:p>
          </table:table-cell>
        </table:table-row>
        <table:table-row table:style-name="Tabla46.2">
          <table:table-cell table:style-name="Tabla46.A2" office:value-type="string">
            <text:p text:style-name="P1" loext:marker-style-name="T16"><text:span text:style-name="T16">24</text:span><text:span text:style-name="T16"/></text:p>
          </table:table-cell>
          <table:table-cell table:style-name="Tabla46.A2" office:value-type="string">
            <text:p text:style-name="P1" loext:marker-style-name="T16"><text:span text:style-name="T16">07/23/2023</text:span><text:span text:style-name="T16"/></text:p>
          </table:table-cell>
          <table:table-cell table:style-name="Tabla46.A2" office:value-type="string">
            <text:p text:style-name="P1" loext:marker-style-name="T16"><text:span text:style-name="T16">7610.28</text:span><text:span text:style-name="T16"/></text:p>
          </table:table-cell>
          <table:table-cell table:style-name="Tabla46.A2" office:value-type="string">
            <text:p text:style-name="P1" loext:marker-style-name="T16"><text:span text:style-name="T16">111.76</text:span><text:span text:style-name="T16"/></text:p>
          </table:table-cell>
          <table:table-cell table:style-name="Tabla46.A2" office:value-type="string">
            <text:p text:style-name="P1" loext:marker-style-name="T16"><text:span text:style-name="T16">535.58</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7074.70</text:span><text:span text:style-name="T16"/></text:p>
          </table:table-cell>
        </table:table-row>
        <table:table-row table:style-name="Tabla46.2">
          <table:table-cell table:style-name="Tabla46.A2" office:value-type="string">
            <text:p text:style-name="P1" loext:marker-style-name="T16"><text:span text:style-name="T16">2</text:span><text:soft-page-break/><text:span text:style-name="T16">5</text:span><text:span text:style-name="T16"/></text:p>
          </table:table-cell>
          <table:table-cell table:style-name="Tabla46.A2" office:value-type="string">
            <text:p text:style-name="P1" loext:marker-style-name="T16"><text:span text:style-name="T16">08/2</text:span><text:soft-page-break/><text:span text:style-name="T16">2/2023</text:span><text:span text:style-name="T16"/></text:p>
          </table:table-cell>
          <table:table-cell table:style-name="Tabla46.A2" office:value-type="string">
            <text:p text:style-name="P1" loext:marker-style-name="T16"><text:span text:style-name="T16">70</text:span><text:soft-page-break/><text:span text:style-name="T16">74.70</text:span><text:span text:style-name="T16"/></text:p>
          </table:table-cell>
          <table:table-cell table:style-name="Tabla46.A2" office:value-type="string">
            <text:p text:style-name="P1" loext:marker-style-name="T16"><text:span text:style-name="T16">10</text:span><text:soft-page-break/><text:span text:style-name="T16">3.89</text:span><text:span text:style-name="T16"/></text:p>
          </table:table-cell>
          <table:table-cell table:style-name="Tabla46.A2" office:value-type="string">
            <text:p text:style-name="P1" loext:marker-style-name="T16"><text:span text:style-name="T16">543.4</text:span><text:soft-page-break/><text:span text:style-name="T16">4</text:span><text:span text:style-name="T16"/></text:p>
          </table:table-cell>
          <table:table-cell table:style-name="Tabla46.A2" office:value-type="string">
            <text:p text:style-name="P1" loext:marker-style-name="T16"><text:span text:style-name="T16">6</text:span><text:soft-page-break/><text:span text:style-name="T16">47.34</text:span><text:span text:style-name="T16"/></text:p>
          </table:table-cell>
          <table:table-cell table:style-name="Tabla46.A2" office:value-type="string">
            <text:p text:style-name="P1" loext:marker-style-name="T16"><text:span text:style-name="T16">65</text:span><text:soft-page-break/><text:span text:style-name="T16">31.26</text:span><text:span text:style-name="T16"/></text:p>
          </table:table-cell>
        </table:table-row>
        <table:table-row table:style-name="Tabla46.2">
          <table:table-cell table:style-name="Tabla46.A2" office:value-type="string">
            <text:p text:style-name="P1" loext:marker-style-name="T16"><text:span text:style-name="T16">26</text:span><text:span text:style-name="T16"/></text:p>
          </table:table-cell>
          <table:table-cell table:style-name="Tabla46.A2" office:value-type="string">
            <text:p text:style-name="P1" loext:marker-style-name="T16"><text:span text:style-name="T16">09/21/2023</text:span><text:span text:style-name="T16"/></text:p>
          </table:table-cell>
          <table:table-cell table:style-name="Tabla46.A2" office:value-type="string">
            <text:p text:style-name="P1" loext:marker-style-name="T16"><text:span text:style-name="T16">6531.26</text:span><text:span text:style-name="T16"/></text:p>
          </table:table-cell>
          <table:table-cell table:style-name="Tabla46.A2" office:value-type="string">
            <text:p text:style-name="P1" loext:marker-style-name="T16"><text:span text:style-name="T16">95.91</text:span><text:span text:style-name="T16"/></text:p>
          </table:table-cell>
          <table:table-cell table:style-name="Tabla46.A2" office:value-type="string">
            <text:p text:style-name="P1" loext:marker-style-name="T16"><text:span text:style-name="T16">551.4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5979.83</text:span><text:span text:style-name="T16"/></text:p>
          </table:table-cell>
        </table:table-row>
        <table:table-row table:style-name="Tabla46.2">
          <table:table-cell table:style-name="Tabla46.A2" office:value-type="string">
            <text:p text:style-name="P1" loext:marker-style-name="T16"><text:span text:style-name="T16">27</text:span><text:span text:style-name="T16"/></text:p>
          </table:table-cell>
          <table:table-cell table:style-name="Tabla46.A2" office:value-type="string">
            <text:p text:style-name="P1" loext:marker-style-name="T16"><text:span text:style-name="T16">10/21/2023</text:span><text:span text:style-name="T16"/></text:p>
          </table:table-cell>
          <table:table-cell table:style-name="Tabla46.A2" office:value-type="string">
            <text:p text:style-name="P1" loext:marker-style-name="T16"><text:span text:style-name="T16">5979.83</text:span><text:span text:style-name="T16"/></text:p>
          </table:table-cell>
          <table:table-cell table:style-name="Tabla46.A2" office:value-type="string">
            <text:p text:style-name="P1" loext:marker-style-name="T16"><text:span text:style-name="T16">87.82</text:span><text:span text:style-name="T16"/></text:p>
          </table:table-cell>
          <table:table-cell table:style-name="Tabla46.A2" office:value-type="string">
            <text:p text:style-name="P1" loext:marker-style-name="T16"><text:span text:style-name="T16">559.5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5420.31</text:span><text:span text:style-name="T16"/></text:p>
          </table:table-cell>
        </table:table-row>
        <table:table-row table:style-name="Tabla46.2">
          <table:table-cell table:style-name="Tabla46.A2" office:value-type="string">
            <text:p text:style-name="P1" loext:marker-style-name="T16"><text:span text:style-name="T16">28</text:span><text:span text:style-name="T16"/></text:p>
          </table:table-cell>
          <table:table-cell table:style-name="Tabla46.A2" office:value-type="string">
            <text:p text:style-name="P1" loext:marker-style-name="T16"><text:span text:style-name="T16">11/20/2023</text:span><text:span text:style-name="T16"/></text:p>
          </table:table-cell>
          <table:table-cell table:style-name="Tabla46.A2" office:value-type="string">
            <text:p text:style-name="P1" loext:marker-style-name="T16"><text:span text:style-name="T16">5420.31</text:span><text:span text:style-name="T16"/></text:p>
          </table:table-cell>
          <table:table-cell table:style-name="Tabla46.A2" office:value-type="string">
            <text:p text:style-name="P1" loext:marker-style-name="T16"><text:span text:style-name="T16">79.60</text:span><text:span text:style-name="T16"/></text:p>
          </table:table-cell>
          <table:table-cell table:style-name="Tabla46.A2" office:value-type="string">
            <text:p text:style-name="P1" loext:marker-style-name="T16"><text:span text:style-name="T16">567.74</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4852.57</text:span><text:span text:style-name="T16"/></text:p>
          </table:table-cell>
        </table:table-row>
        <table:table-row table:style-name="Tabla46.2">
          <table:table-cell table:style-name="Tabla46.A2" office:value-type="string">
            <text:p text:style-name="P1" loext:marker-style-name="T16"><text:span text:style-name="T16">29</text:span><text:span text:style-name="T16"/></text:p>
          </table:table-cell>
          <table:table-cell table:style-name="Tabla46.A2" office:value-type="string">
            <text:p text:style-name="P1" loext:marker-style-name="T16"><text:span text:style-name="T16">12/20/2023</text:span><text:span text:style-name="T16"/></text:p>
          </table:table-cell>
          <table:table-cell table:style-name="Tabla46.A2" office:value-type="string">
            <text:p text:style-name="P1" loext:marker-style-name="T16"><text:span text:style-name="T16">4852.57</text:span><text:span text:style-name="T16"/></text:p>
          </table:table-cell>
          <table:table-cell table:style-name="Tabla46.A2" office:value-type="string">
            <text:p text:style-name="P1" loext:marker-style-name="T16"><text:span text:style-name="T16">71.26</text:span><text:span text:style-name="T16"/></text:p>
          </table:table-cell>
          <table:table-cell table:style-name="Tabla46.A2" office:value-type="string">
            <text:p text:style-name="P1" loext:marker-style-name="T16"><text:span text:style-name="T16">576.08</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4276.50</text:span><text:span text:style-name="T16"/></text:p>
          </table:table-cell>
        </table:table-row>
        <table:table-row table:style-name="Tabla46.2">
          <table:table-cell table:style-name="Tabla46.A2" office:value-type="string">
            <text:p text:style-name="P1" loext:marker-style-name="T16"><text:span text:style-name="T16">30</text:span><text:span text:style-name="T16"/></text:p>
          </table:table-cell>
          <table:table-cell table:style-name="Tabla46.A2" office:value-type="string">
            <text:p text:style-name="P1" loext:marker-style-name="T16"><text:span text:style-name="T16">01/19/2024</text:span><text:span text:style-name="T16"/></text:p>
          </table:table-cell>
          <table:table-cell table:style-name="Tabla46.A2" office:value-type="string">
            <text:p text:style-name="P1" loext:marker-style-name="T16"><text:span text:style-name="T16">4276.50</text:span><text:span text:style-name="T16"/></text:p>
          </table:table-cell>
          <table:table-cell table:style-name="Tabla46.A2" office:value-type="string">
            <text:p text:style-name="P1" loext:marker-style-name="T16"><text:span text:style-name="T16">62.80</text:span><text:span text:style-name="T16"/></text:p>
          </table:table-cell>
          <table:table-cell table:style-name="Tabla46.A2" office:value-type="string">
            <text:p text:style-name="P1" loext:marker-style-name="T16"><text:span text:style-name="T16">584.54</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3691.96</text:span><text:span text:style-name="T16"/></text:p>
          </table:table-cell>
        </table:table-row>
        <table:table-row table:style-name="Tabla46.2">
          <table:table-cell table:style-name="Tabla46.A2" office:value-type="string">
            <text:p text:style-name="P1" loext:marker-style-name="T16"><text:span text:style-name="T16">31</text:span><text:span text:style-name="T16"/></text:p>
          </table:table-cell>
          <table:table-cell table:style-name="Tabla46.A2" office:value-type="string">
            <text:p text:style-name="P1" loext:marker-style-name="T16"><text:span text:style-name="T16">02/18/2024</text:span><text:span text:style-name="T16"/></text:p>
          </table:table-cell>
          <table:table-cell table:style-name="Tabla46.A2" office:value-type="string">
            <text:p text:style-name="P1" loext:marker-style-name="T16"><text:span text:style-name="T16">3691.96</text:span><text:span text:style-name="T16"/></text:p>
          </table:table-cell>
          <table:table-cell table:style-name="Tabla46.A2" office:value-type="string">
            <text:p text:style-name="P1" loext:marker-style-name="T16"><text:span text:style-name="T16">54.22</text:span><text:span text:style-name="T16"/></text:p>
          </table:table-cell>
          <table:table-cell table:style-name="Tabla46.A2" office:value-type="string">
            <text:p text:style-name="P1" loext:marker-style-name="T16"><text:span text:style-name="T16">593.12</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3098.84</text:span><text:span text:style-name="T16"/></text:p>
          </table:table-cell>
        </table:table-row>
        <table:table-row table:style-name="Tabla46.2">
          <table:table-cell table:style-name="Tabla46.A2" office:value-type="string">
            <text:p text:style-name="P1" loext:marker-style-name="T16"><text:span text:style-name="T16">32</text:span><text:span text:style-name="T16"/></text:p>
          </table:table-cell>
          <table:table-cell table:style-name="Tabla46.A2" office:value-type="string">
            <text:p text:style-name="P1" loext:marker-style-name="T16"><text:span text:style-name="T16">03/19/2024</text:span><text:span text:style-name="T16"/></text:p>
          </table:table-cell>
          <table:table-cell table:style-name="Tabla46.A2" office:value-type="string">
            <text:p text:style-name="P1" loext:marker-style-name="T16"><text:span text:style-name="T16">3098.84</text:span><text:span text:style-name="T16"/></text:p>
          </table:table-cell>
          <table:table-cell table:style-name="Tabla46.A2" office:value-type="string">
            <text:p text:style-name="P1" loext:marker-style-name="T16"><text:span text:style-name="T16">45.51</text:span><text:span text:style-name="T16"/></text:p>
          </table:table-cell>
          <table:table-cell table:style-name="Tabla46.A2" office:value-type="string">
            <text:p text:style-name="P1" loext:marker-style-name="T16"><text:span text:style-name="T16">601.83</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2497.01</text:span><text:span text:style-name="T16"/></text:p>
          </table:table-cell>
        </table:table-row>
        <table:table-row table:style-name="Tabla46.2">
          <table:table-cell table:style-name="Tabla46.A2" office:value-type="string">
            <text:p text:style-name="P1" loext:marker-style-name="T16"><text:span text:style-name="T16">33</text:span><text:span text:style-name="T16"/></text:p>
          </table:table-cell>
          <table:table-cell table:style-name="Tabla46.A2" office:value-type="string">
            <text:p text:style-name="P1" loext:marker-style-name="T16"><text:span text:style-name="T16">04/18/2024</text:span><text:span text:style-name="T16"/></text:p>
          </table:table-cell>
          <table:table-cell table:style-name="Tabla46.A2" office:value-type="string">
            <text:p text:style-name="P1" loext:marker-style-name="T16"><text:span text:style-name="T16">2497.01</text:span><text:span text:style-name="T16"/></text:p>
          </table:table-cell>
          <table:table-cell table:style-name="Tabla46.A2" office:value-type="string">
            <text:p text:style-name="P1" loext:marker-style-name="T16"><text:span text:style-name="T16">36.67</text:span><text:span text:style-name="T16"/></text:p>
          </table:table-cell>
          <table:table-cell table:style-name="Tabla46.A2" office:value-type="string">
            <text:p text:style-name="P1" loext:marker-style-name="T16"><text:span text:style-name="T16">610.67</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886.34</text:span><text:span text:style-name="T16"/></text:p>
          </table:table-cell>
        </table:table-row>
        <table:table-row table:style-name="Tabla46.2">
          <table:table-cell table:style-name="Tabla46.A2" office:value-type="string">
            <text:p text:style-name="P1" loext:marker-style-name="T16"><text:span text:style-name="T16">34</text:span><text:span text:style-name="T16"/></text:p>
          </table:table-cell>
          <table:table-cell table:style-name="Tabla46.A2" office:value-type="string">
            <text:p text:style-name="P1" loext:marker-style-name="T16"><text:span text:style-name="T16">05/18/2024</text:span><text:span text:style-name="T16"/></text:p>
          </table:table-cell>
          <table:table-cell table:style-name="Tabla46.A2" office:value-type="string">
            <text:p text:style-name="P1" loext:marker-style-name="T16"><text:span text:style-name="T16">1886.34</text:span><text:span text:style-name="T16"/></text:p>
          </table:table-cell>
          <table:table-cell table:style-name="Tabla46.A2" office:value-type="string">
            <text:p text:style-name="P1" loext:marker-style-name="T16"><text:span text:style-name="T16">27.70</text:span><text:span text:style-name="T16"/></text:p>
          </table:table-cell>
          <table:table-cell table:style-name="Tabla46.A2" office:value-type="string">
            <text:p text:style-name="P1" loext:marker-style-name="T16"><text:span text:style-name="T16">619.64</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1266.70</text:span><text:span text:style-name="T16"/></text:p>
          </table:table-cell>
        </table:table-row>
        <text:soft-page-break/>
        <table:table-row table:style-name="Tabla46.2">
          <table:table-cell table:style-name="Tabla46.A2" office:value-type="string">
            <text:p text:style-name="P1" loext:marker-style-name="T16"><text:span text:style-name="T16">35</text:span><text:span text:style-name="T16"/></text:p>
          </table:table-cell>
          <table:table-cell table:style-name="Tabla46.A2" office:value-type="string">
            <text:p text:style-name="P1" loext:marker-style-name="T16"><text:span text:style-name="T16">06/17/2024</text:span><text:span text:style-name="T16"/></text:p>
          </table:table-cell>
          <table:table-cell table:style-name="Tabla46.A2" office:value-type="string">
            <text:p text:style-name="P1" loext:marker-style-name="T16"><text:span text:style-name="T16">1266.70</text:span><text:span text:style-name="T16"/></text:p>
          </table:table-cell>
          <table:table-cell table:style-name="Tabla46.A2" office:value-type="string">
            <text:p text:style-name="P1" loext:marker-style-name="T16"><text:span text:style-name="T16">18.60</text:span><text:span text:style-name="T16"/></text:p>
          </table:table-cell>
          <table:table-cell table:style-name="Tabla46.A2" office:value-type="string">
            <text:p text:style-name="P1" loext:marker-style-name="T16"><text:span text:style-name="T16">628.74</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637.97</text:span><text:span text:style-name="T16"/></text:p>
          </table:table-cell>
        </table:table-row>
        <table:table-row table:style-name="Tabla46.2">
          <table:table-cell table:style-name="Tabla46.A2" office:value-type="string">
            <text:p text:style-name="P1" loext:marker-style-name="T16"><text:span text:style-name="T16">36</text:span><text:span text:style-name="T16"/></text:p>
          </table:table-cell>
          <table:table-cell table:style-name="Tabla46.A2" office:value-type="string">
            <text:p text:style-name="P1" loext:marker-style-name="T16"><text:span text:style-name="T16">07/17/2024</text:span><text:span text:style-name="T16"/></text:p>
          </table:table-cell>
          <table:table-cell table:style-name="Tabla46.A2" office:value-type="string">
            <text:p text:style-name="P1" loext:marker-style-name="T16"><text:span text:style-name="T16">637.97</text:span><text:span text:style-name="T16"/></text:p>
          </table:table-cell>
          <table:table-cell table:style-name="Tabla46.A2" office:value-type="string">
            <text:p text:style-name="P1" loext:marker-style-name="T16"><text:span text:style-name="T16">9.37</text:span><text:span text:style-name="T16"/></text:p>
          </table:table-cell>
          <table:table-cell table:style-name="Tabla46.A2" office:value-type="string">
            <text:p text:style-name="P1" loext:marker-style-name="T16"><text:span text:style-name="T16">637.97</text:span><text:span text:style-name="T16"/></text:p>
          </table:table-cell>
          <table:table-cell table:style-name="Tabla46.A2" office:value-type="string">
            <text:p text:style-name="P1" loext:marker-style-name="T16"><text:span text:style-name="T16">647.34</text:span><text:span text:style-name="T16"/></text:p>
          </table:table-cell>
          <table:table-cell table:style-name="Tabla46.A2" office:value-type="string">
            <text:p text:style-name="P1" loext:marker-style-name="T16"><text:span text:style-name="T16">0.00</text:span><text:span text:style-name="T16"/></text:p>
          </table:table-cell>
        </table:table-row>
        <table:table-row table:style-name="Tabla46.2">
          <table:table-cell table:style-name="Tabla46.A39" office:value-type="string">
            <text:p text:style-name="P46" loext:marker-style-name="T16"/>
          </table:table-cell>
          <table:table-cell table:style-name="Tabla46.A39" office:value-type="string">
            <text:p text:style-name="P1" loext:marker-style-name="T16"><text:span text:style-name="T16">Total</text:span><text:span text:style-name="T16"/></text:p>
          </table:table-cell>
          <table:table-cell table:style-name="Tabla46.A39" office:value-type="string">
            <text:p text:style-name="P46" loext:marker-style-name="T16"/>
          </table:table-cell>
          <table:table-cell table:style-name="Tabla46.A39" office:value-type="string">
            <text:p text:style-name="P1" loext:marker-style-name="T16"><text:span text:style-name="T16">5304.15</text:span><text:span text:style-name="T16"/></text:p>
          </table:table-cell>
          <table:table-cell table:style-name="Tabla46.A39" office:value-type="string">
            <text:p text:style-name="P1" loext:marker-style-name="T16"><text:span text:style-name="T16">18000.00</text:span><text:span text:style-name="T16"/></text:p>
          </table:table-cell>
          <table:table-cell table:style-name="Tabla46.A39" office:value-type="string">
            <text:p text:style-name="P46" loext:marker-style-name="T16"/>
          </table:table-cell>
          <table:table-cell table:style-name="Tabla46.A39" office:value-type="string">
            <text:p text:style-name="P46" loext:marker-style-name="T16"/>
          </table:table-cell>
        </table:table-row>
      </table:table>
      <text:p text:style-name="P109" loext:marker-style-name="T4"><text:span text:style-name="T4">Nota: COOPAC Santa María Madgalena.</text:span><text:span text:style-name="T4"/></text:p>
      <text:h text:style-name="P82" text:outline-level="2" loext:marker-style-name="T4"><text:bookmark-start text:name="_Toc106699193"/><text:span text:style-name="T4">7.3. Costos de Capital Propio (COK)</text:span><text:bookmark-end text:name="_Toc106699193"/><text:span text:style-name="T4"/></text:h>
      <text:p text:style-name="Standard" loext:marker-style-name="T4"><text:span text:style-name="T4">El Beta total de Mercados Emergentes des apalancado para procesamiento de vestidos de 3.50, es decir la cantidad de riesgo operativo como financiero, que soportan las acciones con respecto al portafolio de mercado.</text:span><text:span text:style-name="T4"/></text:p>
      <text:p text:style-name="Standard" loext:marker-style-name="T4"><text:span text:style-name="T4">Después del análisis se obtuvo una tasa de descuento COK de 22.92%, que es el porcentaje mínimo que espera recibir el accionista por su inversión.</text:span><text:span text:style-name="T4"/></text:p>
      <text:p text:style-name="P202" loext:marker-style-name="T14"><text:span text:style-name="T14">Ecuación </text:span><text:span text:style-name="T14"><text:sequence text:ref-name="refEcuación0" text:name="Ecuación" text:formula="ooow:Ecuación+1" style:num-format="1">1</text:sequence></text:span><text:span text:style-name="T14"><text:s/></text:span></text:p>
      <text:p text:style-name="P202" loext:marker-style-name="T4"><text:span text:style-name="T4">Determinación del COK</text:span><text:span text:style-name="T4"/></text:p>
      <text:p text:style-name="P201" loext:marker-style-name="T4"><draw:frame draw:name="Objeto1" text:anchor-type="as-char" svg:width="8.754cm" svg:height="0.561cm" draw:z-index="61"><draw:object xlink:href="./Object 3" xlink:type="simple" xlink:show="embed" xlink:actuate="onLoad"/><draw:image xlink:href="./ObjectReplacements/Object 3" xlink:type="simple" xlink:show="embed" xlink:actuate="onLoad"/></draw:frame></text:p>
      <table:table table:name="Tabla48" table:style-name="Tabla48">
        <table:table-column table:style-name="Tabla48.A"/>
        <table:table-column table:style-name="Tabla48.B"/>
        <table:table-column table:style-name="Tabla48.C"/>
        <table:table-column table:style-name="Tabla48.D" table:number-columns-repeated="2"/>
        <table:table-column table:style-name="Tabla48.F"/>
        <table:table-column table:style-name="Tabla48.D"/>
        <table:table-column table:style-name="Tabla48.H"/>
        <table:table-row table:style-name="Tabla48.1">
          <table:table-cell table:style-name="Tabla48.A1" office:value-type="string">
            <text:p text:style-name="P42" loext:marker-style-name="T4"><text:span text:style-name="T4">Donde:</text:span><text:span text:style-name="T4"/></text:p>
          </table:table-cell>
          <table:table-cell table:style-name="Tabla48.A1" office:value-type="string">
            <text:p text:style-name="P45" loext:marker-style-name="T4"/>
          </table:table-cell>
          <table:table-cell table:style-name="Tabla48.A1" office:value-type="string">
            <text:p text:style-name="P45" loext:marker-style-name="T4"/>
          </table:table-cell>
          <table:table-cell table:style-name="Tabla48.A1" office:value-type="string">
            <text:p text:style-name="P45" loext:marker-style-name="T4"/>
          </table:table-cell>
          <table:table-cell table:style-name="Tabla48.A1" office:value-type="string">
            <text:p text:style-name="P45" loext:marker-style-name="T4"/>
          </table:table-cell>
          <table:table-cell table:style-name="Tabla48.A1" office:value-type="string">
            <text:p text:style-name="P45" loext:marker-style-name="T4"/>
          </table:table-cell>
          <table:table-cell table:style-name="Tabla48.A1" office:value-type="string">
            <text:p text:style-name="P45" loext:marker-style-name="T4"/>
          </table:table-cell>
          <table:table-cell table:style-name="Tabla48.A1" office:value-type="string">
            <text:p text:style-name="P45" loext:marker-style-name="T4"/>
          </table:table-cell>
        </table:table-row>
        <table:table-row table:style-name="Tabla48.1">
          <table:table-cell table:style-name="Tabla48.A2" office:value-type="string">
            <text:p text:style-name="P42" loext:marker-style-name="T4"><text:span text:style-name="T4">Rf usa =</text:span><text:span text:style-name="T4"/></text:p>
          </table:table-cell>
          <table:table-cell table:style-name="Tabla48.A2" office:value-type="string">
            <text:p text:style-name="P1" loext:marker-style-name="T4"><text:span text:style-name="T4">4.95%</text:span><text:span text:style-name="T4"/></text:p>
          </table:table-cell>
          <table:table-cell table:style-name="Tabla48.A2" table:number-columns-spanned="6" office:value-type="string">
            <text:p text:style-name="P1" loext:marker-style-name="T4"><text:span text:style-name="T4">Promedio geométrico 1928-2020 *los últimos 30 años</text:span><text:span text:style-name="T4"/></text:p>
          </table:table-cell>
          <table:covered-table-cell/>
          <table:covered-table-cell/>
          <table:covered-table-cell/>
          <table:covered-table-cell/>
          <table:covered-table-cell/>
        </table:table-row>
        <table:table-row table:style-name="Tabla48.3">
          <table:table-cell table:style-name="Tabla48.A1" office:value-type="string">
            <text:p text:style-name="P42" loext:marker-style-name="T4"><text:span text:style-name="T4">βu total ME =</text:span><text:span text:style-name="T4"/></text:p>
          </table:table-cell>
          <table:table-cell table:style-name="Tabla48.A1" office:value-type="string">
            <text:p text:style-name="P1" loext:marker-style-name="T4"><text:span text:style-name="T4">3.50</text:span><text:span text:style-name="T4"/></text:p>
          </table:table-cell>
          <table:table-cell table:style-name="Tabla48.A1" table:number-columns-spanned="6" office:value-type="string">
            <text:p text:style-name="P1" loext:marker-style-name="T4"><text:span text:style-name="T4">Beta total des apalancado para procesamiento de vestidos</text:span><text:span text:style-name="T4"/></text:p>
          </table:table-cell>
          <table:covered-table-cell/>
          <table:covered-table-cell/>
          <table:covered-table-cell/>
          <table:covered-table-cell/>
          <table:covered-table-cell/>
        </table:table-row>
        <table:table-row table:style-name="Tabla48.1">
          <table:table-cell table:style-name="Tabla48.A2" office:value-type="string">
            <text:p text:style-name="P42" loext:marker-style-name="T4"><text:span text:style-name="T4">(Rm-Rf) =</text:span><text:span text:style-name="T4"/></text:p>
          </table:table-cell>
          <table:table-cell table:style-name="Tabla48.A2" office:value-type="string">
            <text:p text:style-name="P1" loext:marker-style-name="T4"><text:span text:style-name="T4">4.64%</text:span><text:span text:style-name="T4"/></text:p>
          </table:table-cell>
          <table:table-cell table:style-name="Tabla48.A2" table:number-columns-spanned="6" office:value-type="string">
            <text:p text:style-name="P1" loext:marker-style-name="T4"><text:span text:style-name="T4">promedio geométrico 1928-2020 *los últimos 30 años</text:span><text:span text:style-name="T4"/></text:p>
          </table:table-cell>
          <table:covered-table-cell/>
          <table:covered-table-cell/>
          <table:covered-table-cell/>
          <table:covered-table-cell/>
          <table:covered-table-cell/>
        </table:table-row>
        <table:table-row table:style-name="Tabla48.1">
          <table:table-cell table:style-name="Tabla48.A1" office:value-type="string">
            <text:p text:style-name="P42" loext:marker-style-name="T4"><text:span text:style-name="T4">Rp =</text:span><text:span text:style-name="T4"/></text:p>
          </table:table-cell>
          <table:table-cell table:style-name="Tabla48.A1" office:value-type="string">
            <text:p text:style-name="P1" loext:marker-style-name="T4"><text:span text:style-name="T4">1.30%</text:span><text:span text:style-name="T4"/></text:p>
          </table:table-cell>
          <table:table-cell table:style-name="Tabla48.A1" table:number-columns-spanned="6" office:value-type="string">
            <text:p text:style-name="P1" loext:marker-style-name="T4"><text:span text:style-name="T4">Promedio 2020</text:span><text:span text:style-name="T4"/></text:p>
          </table:table-cell>
          <table:covered-table-cell/>
          <table:covered-table-cell/>
          <table:covered-table-cell/>
          <table:covered-table-cell/>
          <table:covered-table-cell/>
        </table:table-row>
        <table:table-row table:style-name="Tabla48.1">
          <table:table-cell table:style-name="Tabla48.A2" office:value-type="string">
            <text:p text:style-name="P42" loext:marker-style-name="T4"><text:span text:style-name="T4">Kurt =</text:span><text:span text:style-name="T4"/></text:p>
          </table:table-cell>
          <table:table-cell table:style-name="Tabla48.A2" office:value-type="string">
            <text:p text:style-name="P1" loext:marker-style-name="T4"><text:span text:style-name="T4">22.4%</text:span><text:span text:style-name="T4"/></text:p>
          </table:table-cell>
          <table:table-cell table:style-name="Tabla48.A2" table:number-columns-spanned="6" office:value-type="string">
            <text:p text:style-name="P1" loext:marker-style-name="T4"><text:span text:style-name="T4">COK des apalancado con Riesgo Total</text:span><text:span text:style-name="T4"/></text:p>
          </table:table-cell>
          <table:covered-table-cell/>
          <table:covered-table-cell/>
          <table:covered-table-cell/>
          <table:covered-table-cell/>
          <table:covered-table-cell/>
        </table:table-row>
      </table:table>
      <text:p text:style-name="P131" loext:marker-style-name="T4"/>
      <text:h text:style-name="P78" text:outline-level="2" loext:marker-style-name="T4"><text:bookmark-start text:name="_Toc106699194"/><text:span text:style-name="T4">7.4. Costos de Capital Promedio Ponderado (KWACC)</text:span><text:bookmark-end text:name="_Toc106699194"/><text:span text:style-name="T4"/></text:h>
      <text:p text:style-name="Standard" loext:marker-style-name="T4"><text:span text:style-name="T4">Dado la combinación del capital propio (E/V*) con un monto en porcentajes de 24.0% con un capital financiado (D/V*) por tercero de 76.0% Procedemos a la determinación ponderada de participación. Como se puede observar en la gráfica el valor del costo de capital ponderado es de 21.5%.</text:span><text:span text:style-name="T4"/></text:p>
      <text:p text:style-name="P202" loext:marker-style-name="T14"><text:span text:style-name="T14">Ecuación </text:span><text:span text:style-name="T14"><text:sequence text:ref-name="refEcuación1" text:name="Ecuación" text:formula="ooow:Ecuación+1" style:num-format="1">2</text:sequence></text:span><text:span text:style-name="T14"><text:s/></text:span></text:p>
      <text:p text:style-name="P202" loext:marker-style-name="T4"><text:span text:style-name="T4">Costo Promedio Ponderado de Capital con riesgo total</text:span><text:span text:style-name="T4"/></text:p>
      <text:p text:style-name="P123" loext:marker-style-name="T4"><draw:frame draw:name="Objeto2" text:anchor-type="as-char" svg:width="6.1cm" svg:height="1.004cm" draw:z-index="62"><draw:object xlink:href="./Object 4" xlink:type="simple" xlink:show="embed" xlink:actuate="onLoad"/><draw:image xlink:href="./ObjectReplacements/Object 4" xlink:type="simple" xlink:show="embed" xlink:actuate="onLoad"/></draw:frame></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42" loext:marker-style-name="T4"><text:span text:style-name="T4">Dónde:</text:span><text:span text:style-name="T4"/></text:p>
          </table:table-cell>
          <table:table-cell table:style-name="Tabla49.A1" office:value-type="string">
            <text:p text:style-name="P45" loext:marker-style-name="T4"/>
          </table:table-cell>
          <table:table-cell table:style-name="Tabla49.A1" office:value-type="string">
            <text:p text:style-name="P45" loext:marker-style-name="T4"/>
          </table:table-cell>
        </table:table-row>
        <text:soft-page-break/>
        <table:table-row table:style-name="Tabla49.1">
          <table:table-cell table:style-name="Tabla49.A2" office:value-type="string">
            <text:p text:style-name="P42" loext:marker-style-name="T4"><text:span text:style-name="T4">E/V* =</text:span><text:span text:style-name="T4"/></text:p>
          </table:table-cell>
          <table:table-cell table:style-name="Tabla49.A2" office:value-type="string">
            <text:p text:style-name="P1" loext:marker-style-name="T4"><text:span text:style-name="T4">24.0%</text:span><text:span text:style-name="T4"/></text:p>
          </table:table-cell>
          <table:table-cell table:style-name="Tabla49.A2" office:value-type="string">
            <text:p text:style-name="P1" loext:marker-style-name="T4"><text:span text:style-name="T4">Combinación del capital propio</text:span><text:span text:style-name="T4"/></text:p>
          </table:table-cell>
        </table:table-row>
        <table:table-row table:style-name="Tabla49.3">
          <table:table-cell table:style-name="Tabla49.A1" office:value-type="string">
            <text:p text:style-name="P42" loext:marker-style-name="T4"><text:span text:style-name="T4">Kert =</text:span><text:span text:style-name="T4"/></text:p>
          </table:table-cell>
          <table:table-cell table:style-name="Tabla49.A1" office:value-type="string">
            <text:p text:style-name="P1" loext:marker-style-name="T4"><text:span text:style-name="T4">21.1%</text:span><text:span text:style-name="T4"/></text:p>
          </table:table-cell>
          <table:table-cell table:style-name="Tabla49.A1" office:value-type="string">
            <text:p text:style-name="P1" loext:marker-style-name="T4"><text:span text:style-name="T4">Costo de capital propio apalancado</text:span><text:span text:style-name="T4"/></text:p>
          </table:table-cell>
        </table:table-row>
        <table:table-row table:style-name="Tabla49.1">
          <table:table-cell table:style-name="Tabla49.A2" office:value-type="string">
            <text:p text:style-name="P42" loext:marker-style-name="T4"><text:span text:style-name="T4">D/V* = </text:span><text:span text:style-name="T4"/></text:p>
          </table:table-cell>
          <table:table-cell table:style-name="Tabla49.A2" office:value-type="string">
            <text:p text:style-name="P1" loext:marker-style-name="T4"><text:span text:style-name="T4">76.0%</text:span><text:span text:style-name="T4"/></text:p>
          </table:table-cell>
          <table:table-cell table:style-name="Tabla49.A2" office:value-type="string">
            <text:p text:style-name="P49" loext:marker-style-name="T4"/>
          </table:table-cell>
        </table:table-row>
        <table:table-row table:style-name="Tabla49.1">
          <table:table-cell table:style-name="Tabla49.A1" office:value-type="string">
            <text:p text:style-name="P42" loext:marker-style-name="T4"><text:span text:style-name="T4">Kd = </text:span><text:span text:style-name="T4"/></text:p>
          </table:table-cell>
          <table:table-cell table:style-name="Tabla49.A1" office:value-type="string">
            <text:p text:style-name="P1" loext:marker-style-name="T4"><text:span text:style-name="T4">21.0%</text:span><text:span text:style-name="T4"/></text:p>
          </table:table-cell>
          <table:table-cell table:style-name="Tabla49.A1" office:value-type="string">
            <text:p text:style-name="P1" loext:marker-style-name="T4"><text:span text:style-name="T4">Costo de la deuda</text:span><text:span text:style-name="T4"/></text:p>
          </table:table-cell>
        </table:table-row>
        <table:table-row table:style-name="Tabla49.1">
          <table:table-cell table:style-name="Tabla49.A2" office:value-type="string">
            <text:p text:style-name="P42" loext:marker-style-name="T4"><text:span text:style-name="T4">t =</text:span><text:span text:style-name="T4"/></text:p>
          </table:table-cell>
          <table:table-cell table:style-name="Tabla49.A2" office:value-type="string">
            <text:p text:style-name="P1" loext:marker-style-name="T4"><text:span text:style-name="T4">1.5%</text:span><text:span text:style-name="T4"/></text:p>
          </table:table-cell>
          <table:table-cell table:style-name="Tabla49.A2" office:value-type="string">
            <text:p text:style-name="P1" loext:marker-style-name="T4"><text:span text:style-name="T4">Tasa de impuesto a la renta</text:span><text:span text:style-name="T4"/></text:p>
          </table:table-cell>
        </table:table-row>
        <table:table-row table:style-name="Tabla49.7">
          <table:table-cell table:style-name="Tabla49.A1" office:value-type="string">
            <text:p text:style-name="P42" loext:marker-style-name="T4"><text:span text:style-name="T4">Kwacc = </text:span><text:span text:style-name="T4"/></text:p>
          </table:table-cell>
          <table:table-cell table:style-name="Tabla49.A1" office:value-type="string">
            <text:p text:style-name="P1" loext:marker-style-name="T4"><text:span text:style-name="T4">21.5%</text:span><text:span text:style-name="T4"/></text:p>
          </table:table-cell>
          <table:table-cell table:style-name="Tabla49.A1" office:value-type="string">
            <text:p text:style-name="P49" loext:marker-style-name="T4"/>
          </table:table-cell>
        </table:table-row>
      </table:table>
      <text:h text:style-name="P68" text:outline-level="1" loext:marker-style-name="T4"><text:bookmark-start text:name="_Toc106699195"/><text:span text:style-name="T4">Capítulo VIII. Rentabilidad del proyecto</text:span><text:bookmark-end text:name="_Toc106699195"/><text:span text:style-name="T4"/></text:h>
      <text:h text:style-name="P78" text:outline-level="2" loext:marker-style-name="T4"><text:bookmark-start text:name="_Toc106699196"/><text:span text:style-name="T4">8.1. Premisas</text:span><text:bookmark-end text:name="_Toc106699196"/><text:span text:style-name="T4"/></text:h>
      <text:p text:style-name="P116" loext:marker-style-name="T10"><text:span text:style-name="T10"><text:s text:c="11"/>El horizonte de evaluación del proyecto es de 5 años, el precio de venta de nuestros polos es de 53 soles, y el coste de oportunidad es de 12% nominal anual y la TEA es de 21.50%.</text:span><text:span text:style-name="T10"/></text:p>
      <text:p text:style-name="P116" loext:marker-style-name="T10"><text:span text:style-name="T10">El capital de trabajo se realiza con el método de déficit acumulado máximo, se calcularon las depreciaciones de los activos y se estimó el valor de recupero con el método contable. El flujo de caja está proyectado en términos reales, la realización de la compra de nuestra materia prima y la venta de nuestro producto es al contado, y no se cuenta con stock de inventarios en productos tanto como en materia prima.</text:span><text:span text:style-name="T10"/></text:p>
      <text:h text:style-name="P78" text:outline-level="2" loext:marker-style-name="T4"><text:bookmark-start text:name="_Toc106699197"/><text:span text:style-name="T4">8.2. Flujo de caja Económico y financiero</text:span><text:bookmark-end text:name="_Toc106699197"/><text:span text:style-name="T4"/></text:h>
      <text:p text:style-name="P205" loext:marker-style-name="T4"/>
      <text:p text:style-name="P208" loext:marker-style-name="T51"><text:bookmark-start text:name="_Toc106698922"/><text:span text:style-name="T51">Tabla </text:span><text:bookmark-end text:name="_Toc106698922"/><text:span text:style-name="T51"><text:sequence text:ref-name="refTable23" text:name="Table" text:formula="ooow:Table+1" style:num-format="1">24</text:sequence></text:span><text:span text:style-name="T51"><text:s/></text:span></text:p>
      <text:p text:style-name="TÍTULO_20_Tablas_20_y_20_Figuras">Flujo de caja real de la empresa StampAdek de polos personalizados.</text:p>
      <table:table table:name="Tabla51" table:style-name="Tabla51">
        <table:table-column table:style-name="Tabla51.A"/>
        <table:table-column table:style-name="Tabla51.B" table:number-columns-repeated="6"/>
        <table:table-row table:style-name="Tabla51.1">
          <table:table-cell table:style-name="Tabla51.A1" office:value-type="string">
            <text:p text:style-name="P1" loext:marker-style-name="T17"><text:span text:style-name="T17">RUBRO</text:span><text:span text:style-name="T17"/></text:p>
            <text:p text:style-name="P51" loext:marker-style-name="T17"/>
          </table:table-cell>
          <table:table-cell table:style-name="Tabla51.A1" office:value-type="string">
            <text:p text:style-name="P1" loext:marker-style-name="T17"><text:span text:style-name="T17">Año 0</text:span><text:span text:style-name="T17"/></text:p>
          </table:table-cell>
          <table:table-cell table:style-name="Tabla51.A1" office:value-type="string">
            <text:p text:style-name="P1" loext:marker-style-name="T17"><text:span text:style-name="T17">Año 1</text:span><text:span text:style-name="T17"/></text:p>
          </table:table-cell>
          <table:table-cell table:style-name="Tabla51.A1" office:value-type="string">
            <text:p text:style-name="P1" loext:marker-style-name="T17"><text:span text:style-name="T17">Año 2</text:span><text:span text:style-name="T17"/></text:p>
          </table:table-cell>
          <table:table-cell table:style-name="Tabla51.A1" office:value-type="string">
            <text:p text:style-name="P1" loext:marker-style-name="T17"><text:span text:style-name="T17">Año 3</text:span><text:span text:style-name="T17"/></text:p>
          </table:table-cell>
          <table:table-cell table:style-name="Tabla51.A1" office:value-type="string">
            <text:p text:style-name="P1" loext:marker-style-name="T17"><text:span text:style-name="T17">Año 4</text:span><text:span text:style-name="T17"/></text:p>
          </table:table-cell>
          <table:table-cell table:style-name="Tabla51.A1" office:value-type="string">
            <text:p text:style-name="P1" loext:marker-style-name="T17"><text:span text:style-name="T17">Año 5</text:span><text:span text:style-name="T17"/></text:p>
          </table:table-cell>
        </table:table-row>
        <table:table-row table:style-name="Tabla51.1">
          <table:table-cell table:style-name="Tabla51.A2" office:value-type="string">
            <text:p text:style-name="P3" loext:marker-style-name="T17"><text:span text:style-name="T17">Flujo de Inversión y Liquidación</text:span><text:span text:style-name="T17"/></text:p>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row>
        <table:table-row table:style-name="Tabla51.1">
          <table:table-cell table:style-name="Tabla51.A2" office:value-type="string">
            <text:p text:style-name="P3" loext:marker-style-name="T17"><text:span text:style-name="T17">Activo fijo tangible</text:span><text:span text:style-name="T17"/></text:p>
          </table:table-cell>
          <table:table-cell table:style-name="Tabla51.A2" office:value-type="string">
            <text:p text:style-name="P12" loext:marker-style-name="T17"><text:span text:style-name="T17">-10838.00</text:span><text:span text:style-name="T17"/></text:p>
          </table:table-cell>
          <table:table-cell table:style-name="Tabla51.A2" office:value-type="string">
            <text:p text:style-name="P12" loext:marker-style-name="T17"><text:span text:style-name="T17">-15.00</text:span><text:span text:style-name="T17"/></text:p>
          </table:table-cell>
          <table:table-cell table:style-name="Tabla51.A2" office:value-type="string">
            <text:p text:style-name="P12" loext:marker-style-name="T17"><text:span text:style-name="T17">-5372.00</text:span><text:span text:style-name="T17"/></text:p>
          </table:table-cell>
          <table:table-cell table:style-name="Tabla51.A2" office:value-type="string">
            <text:p text:style-name="P12" loext:marker-style-name="T17"><text:span text:style-name="T17">-3415.00</text:span><text:span text:style-name="T17"/></text:p>
          </table:table-cell>
          <table:table-cell table:style-name="Tabla51.A2" office:value-type="string">
            <text:p text:style-name="P12" loext:marker-style-name="T17"><text:span text:style-name="T17">-5372.00</text:span><text:span text:style-name="T17"/></text:p>
          </table:table-cell>
          <table:table-cell table:style-name="Tabla51.A2" office:value-type="string">
            <text:p text:style-name="P12" loext:marker-style-name="T17"><text:span text:style-name="T17">-15.00</text:span><text:span text:style-name="T17"/></text:p>
          </table:table-cell>
        </table:table-row>
        <table:table-row table:style-name="Tabla51.1">
          <table:table-cell table:style-name="Tabla51.A2" office:value-type="string">
            <text:p text:style-name="P3" loext:marker-style-name="T17"><text:span text:style-name="T17">Activo fijo intangible</text:span><text:span text:style-name="T17"/></text:p>
          </table:table-cell>
          <table:table-cell table:style-name="Tabla51.A2" office:value-type="string">
            <text:p text:style-name="P12" loext:marker-style-name="T17"><text:span text:style-name="T17">-1116.99</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
          <table:table-cell table:style-name="Tabla51.A2" office:value-type="string">
            <text:p text:style-name="P3" loext:marker-style-name="T17"><text:span text:style-name="T17">Capital de trabajo</text:span><text:span text:style-name="T17"/></text:p>
          </table:table-cell>
          <table:table-cell table:style-name="Tabla51.A2" office:value-type="string">
            <text:p text:style-name="P12" loext:marker-style-name="T17"><text:span text:style-name="T17">-12336.33</text:span><text:span text:style-name="T17"/></text:p>
          </table:table-cell>
          <table:table-cell table:style-name="Tabla51.A2" office:value-type="string">
            <text:p text:style-name="P12" loext:marker-style-name="T17"><text:span text:style-name="T17">-2215.48</text:span><text:span text:style-name="T17"/></text:p>
          </table:table-cell>
          <table:table-cell table:style-name="Tabla51.A2" office:value-type="string">
            <text:p text:style-name="P12" loext:marker-style-name="T17"><text:span text:style-name="T17">-2215.48</text:span><text:span text:style-name="T17"/></text:p>
          </table:table-cell>
          <table:table-cell table:style-name="Tabla51.A2" office:value-type="string">
            <text:p text:style-name="P12" loext:marker-style-name="T17"><text:span text:style-name="T17">-2215.48</text:span><text:span text:style-name="T17"/></text:p>
          </table:table-cell>
          <table:table-cell table:style-name="Tabla51.A2" office:value-type="string">
            <text:p text:style-name="P12" loext:marker-style-name="T17"><text:span text:style-name="T17">-2215.48</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
          <table:table-cell table:style-name="Tabla51.A2" office:value-type="string">
            <text:p text:style-name="P3" loext:marker-style-name="T17"><text:span text:style-name="T17">Recupero capital de trabajo</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21198.24</text:span><text:span text:style-name="T17"/></text:p>
          </table:table-cell>
        </table:table-row>
        <table:table-row table:style-name="Tabla51.1">
          <table:table-cell table:style-name="Tabla51.A2" office:value-type="string">
            <text:p text:style-name="P3" loext:marker-style-name="T17"><text:span text:style-name="T17">Recupero activo fijo tangible</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3826.12</text:span><text:span text:style-name="T17"/></text:p>
          </table:table-cell>
        </table:table-row>
        <table:table-row table:style-name="Tabla51.1">
          <table:table-cell table:style-name="Tabla51.A2" office:value-type="string">
            <text:p text:style-name="P3" loext:marker-style-name="T17"><text:span text:style-name="T17">Total, Flujo de inversión y liquidación</text:span><text:span text:style-name="T17"/></text:p>
          </table:table-cell>
          <table:table-cell table:style-name="Tabla51.A2" office:value-type="string">
            <text:p text:style-name="P12" loext:marker-style-name="T17"><text:span text:style-name="T17">-24291.32</text:span><text:span text:style-name="T17"/></text:p>
          </table:table-cell>
          <table:table-cell table:style-name="Tabla51.A2" office:value-type="string">
            <text:p text:style-name="P12" loext:marker-style-name="T17"><text:span text:style-name="T17">-2230.48</text:span><text:span text:style-name="T17"/></text:p>
          </table:table-cell>
          <table:table-cell table:style-name="Tabla51.A2" office:value-type="string">
            <text:p text:style-name="P12" loext:marker-style-name="T17"><text:span text:style-name="T17">-7587.48</text:span><text:span text:style-name="T17"/></text:p>
          </table:table-cell>
          <table:table-cell table:style-name="Tabla51.A2" office:value-type="string">
            <text:p text:style-name="P12" loext:marker-style-name="T17"><text:span text:style-name="T17">-5630.48</text:span><text:span text:style-name="T17"/></text:p>
          </table:table-cell>
          <table:table-cell table:style-name="Tabla51.A2" office:value-type="string">
            <text:p text:style-name="P12" loext:marker-style-name="T17"><text:span text:style-name="T17">-7587.48</text:span><text:span text:style-name="T17"/></text:p>
          </table:table-cell>
          <table:table-cell table:style-name="Tabla51.A2" office:value-type="string">
            <text:p text:style-name="P12" loext:marker-style-name="T17"><text:span text:style-name="T17">25009.36</text:span><text:span text:style-name="T17"/></text:p>
          </table:table-cell>
        </table:table-row>
        <table:table-row table:style-name="Tabla51.1">
          <table:table-cell table:style-name="Tabla51.A2" office:value-type="string">
            <text:p text:style-name="P3" loext:marker-style-name="T17"><text:span text:style-name="T17">Ingreso por ventas</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196560.00</text:span><text:span text:style-name="T17"/></text:p>
          </table:table-cell>
          <table:table-cell table:style-name="Tabla51.A2" office:value-type="string">
            <text:p text:style-name="P12" loext:marker-style-name="T17"><text:span text:style-name="T17">231860.14</text:span><text:span text:style-name="T17"/></text:p>
          </table:table-cell>
          <table:table-cell table:style-name="Tabla51.A2" office:value-type="string">
            <text:p text:style-name="P12" loext:marker-style-name="T17"><text:span text:style-name="T17">267160.28</text:span><text:span text:style-name="T17"/></text:p>
          </table:table-cell>
          <table:table-cell table:style-name="Tabla51.A2" office:value-type="string">
            <text:p text:style-name="P12" loext:marker-style-name="T17"><text:span text:style-name="T17">302460.42</text:span><text:span text:style-name="T17"/></text:p>
          </table:table-cell>
          <table:table-cell table:style-name="Tabla51.A2" office:value-type="string">
            <text:p text:style-name="P12" loext:marker-style-name="T17"><text:span text:style-name="T17">337760.56</text:span><text:span text:style-name="T17"/></text:p>
          </table:table-cell>
        </table:table-row>
        <table:table-row table:style-name="Tabla51.1">
          <table:table-cell table:style-name="Tabla51.A2" office:value-type="string">
            <text:p text:style-name="P3" loext:marker-style-name="T17"><text:span text:style-name="T17">Costos de producción</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106949.02</text:span><text:span text:style-name="T17"/></text:p>
          </table:table-cell>
          <table:table-cell table:style-name="Tabla51.A2" office:value-type="string">
            <text:p text:style-name="P12" loext:marker-style-name="T17"><text:span text:style-name="T17">-126155.96</text:span><text:span text:style-name="T17"/></text:p>
          </table:table-cell>
          <table:table-cell table:style-name="Tabla51.A2" office:value-type="string">
            <text:p text:style-name="P12" loext:marker-style-name="T17"><text:span text:style-name="T17">-145362.90</text:span><text:span text:style-name="T17"/></text:p>
          </table:table-cell>
          <table:table-cell table:style-name="Tabla51.A2" office:value-type="string">
            <text:p text:style-name="P12" loext:marker-style-name="T17"><text:span text:style-name="T17">-164569.83</text:span><text:span text:style-name="T17"/></text:p>
          </table:table-cell>
          <table:table-cell table:style-name="Tabla51.A2" office:value-type="string">
            <text:p text:style-name="P12" loext:marker-style-name="T17"><text:span text:style-name="T17">-183776.77</text:span><text:span text:style-name="T17"/></text:p>
          </table:table-cell>
        </table:table-row>
        <table:table-row table:style-name="Tabla51.1">
          <table:table-cell table:style-name="Tabla51.A2" office:value-type="string">
            <text:p text:style-name="P3" loext:marker-style-name="T17"><text:span text:style-name="T17">Gastos de venta</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21420.00</text:span><text:span text:style-name="T17"/></text:p>
          </table:table-cell>
          <table:table-cell table:style-name="Tabla51.A2" office:value-type="string">
            <text:p text:style-name="P12" loext:marker-style-name="T17"><text:span text:style-name="T17">-21420.00</text:span><text:span text:style-name="T17"/></text:p>
          </table:table-cell>
          <table:table-cell table:style-name="Tabla51.A2" office:value-type="string">
            <text:p text:style-name="P12" loext:marker-style-name="T17"><text:span text:style-name="T17">-21420.00</text:span><text:span text:style-name="T17"/></text:p>
          </table:table-cell>
          <table:table-cell table:style-name="Tabla51.A2" office:value-type="string">
            <text:p text:style-name="P12" loext:marker-style-name="T17"><text:span text:style-name="T17">-21420.00</text:span><text:span text:style-name="T17"/></text:p>
          </table:table-cell>
          <table:table-cell table:style-name="Tabla51.A2" office:value-type="string">
            <text:p text:style-name="P12" loext:marker-style-name="T17"><text:span text:style-name="T17">-21420.00</text:span><text:span text:style-name="T17"/></text:p>
          </table:table-cell>
        </table:table-row>
        <table:table-row table:style-name="Tabla51.1">
          <table:table-cell table:style-name="Tabla51.A2" office:value-type="string">
            <text:p text:style-name="P3" loext:marker-style-name="T17"><text:span text:style-name="T17">Pago de IGV</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14013.18</text:span><text:span text:style-name="T17"/></text:p>
          </table:table-cell>
          <table:table-cell table:style-name="Tabla51.A2" office:value-type="string">
            <text:p text:style-name="P12" loext:marker-style-name="T17"><text:span text:style-name="T17">-16909.95</text:span><text:span text:style-name="T17"/></text:p>
          </table:table-cell>
          <table:table-cell table:style-name="Tabla51.A2" office:value-type="string">
            <text:p text:style-name="P12" loext:marker-style-name="T17"><text:span text:style-name="T17">-19806.73</text:span><text:span text:style-name="T17"/></text:p>
          </table:table-cell>
          <table:table-cell table:style-name="Tabla51.A2" office:value-type="string">
            <text:p text:style-name="P12" loext:marker-style-name="T17"><text:span text:style-name="T17">-22703.51</text:span><text:span text:style-name="T17"/></text:p>
          </table:table-cell>
          <table:table-cell table:style-name="Tabla51.A2" office:value-type="string">
            <text:p text:style-name="P12" loext:marker-style-name="T17"><text:span text:style-name="T17">-25600.28</text:span><text:span text:style-name="T17"/></text:p>
          </table:table-cell>
        </table:table-row>
        <table:table-row table:style-name="Tabla51.1">
          <table:table-cell table:style-name="Tabla51.A2" office:value-type="string">
            <text:p text:style-name="P3" loext:marker-style-name="T17"><text:span text:style-name="T17">Impuestos</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541.96</text:span><text:span text:style-name="T17"/></text:p>
          </table:table-cell>
          <table:table-cell table:style-name="Tabla51.A2" office:value-type="string">
            <text:p text:style-name="P12" loext:marker-style-name="T17"><text:span text:style-name="T17">-783.35</text:span><text:span text:style-name="T17"/></text:p>
          </table:table-cell>
          <table:table-cell table:style-name="Tabla51.A2" office:value-type="string">
            <text:p text:style-name="P12" loext:marker-style-name="T17"><text:span text:style-name="T17">-1024.75</text:span><text:span text:style-name="T17"/></text:p>
          </table:table-cell>
          <table:table-cell table:style-name="Tabla51.A2" office:value-type="string">
            <text:p text:style-name="P12" loext:marker-style-name="T17"><text:span text:style-name="T17">-1266.15</text:span><text:span text:style-name="T17"/></text:p>
          </table:table-cell>
          <table:table-cell table:style-name="Tabla51.A2" office:value-type="string">
            <text:p text:style-name="P12" loext:marker-style-name="T17"><text:span text:style-name="T17">-1507.55</text:span><text:span text:style-name="T17"/></text:p>
          </table:table-cell>
        </table:table-row>
        <table:table-row table:style-name="Tabla51.1">
          <table:table-cell table:style-name="Tabla51.A2" office:value-type="string">
            <text:p text:style-name="P3" loext:marker-style-name="T17"><text:span text:style-name="T17">Total, Flujo de Caja operativo</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26035.84</text:span><text:span text:style-name="T17"/></text:p>
          </table:table-cell>
          <table:table-cell table:style-name="Tabla51.A2" office:value-type="string">
            <text:p text:style-name="P12" loext:marker-style-name="T17"><text:span text:style-name="T17">38990.7</text:span><text:span text:style-name="T17"/></text:p>
          </table:table-cell>
          <table:table-cell table:style-name="Tabla51.A2" office:value-type="string">
            <text:p text:style-name="P12" loext:marker-style-name="T17"><text:span text:style-name="T17">51945.90</text:span><text:span text:style-name="T17"/></text:p>
          </table:table-cell>
          <table:table-cell table:style-name="Tabla51.A2" office:value-type="string">
            <text:p text:style-name="P12" loext:marker-style-name="T17"><text:span text:style-name="T17">64900.93</text:span><text:span text:style-name="T17"/></text:p>
          </table:table-cell>
          <table:table-cell table:style-name="Tabla51.A2" office:value-type="string">
            <text:p text:style-name="P12" loext:marker-style-name="T17"><text:span text:style-name="T17">77855.96</text:span><text:span text:style-name="T17"/></text:p>
          </table:table-cell>
        </table:table-row>
        <table:table-row table:style-name="Tabla51.1">
          <table:table-cell table:style-name="Tabla51.A2" office:value-type="string">
            <text:p text:style-name="P3" loext:marker-style-name="T17"><text:span text:style-name="T17">Flujo de Caja económico FCE</text:span><text:span text:style-name="T17"/></text:p>
          </table:table-cell>
          <table:table-cell table:style-name="Tabla51.A2" office:value-type="string">
            <text:p text:style-name="P12" loext:marker-style-name="T17"><text:span text:style-name="T17">-24291.32</text:span><text:span text:style-name="T17"/></text:p>
          </table:table-cell>
          <table:table-cell table:style-name="Tabla51.A2" office:value-type="string">
            <text:p text:style-name="P12" loext:marker-style-name="T17"><text:span text:style-name="T17">23805.37</text:span><text:span text:style-name="T17"/></text:p>
          </table:table-cell>
          <table:table-cell table:style-name="Tabla51.A2" office:value-type="string">
            <text:p text:style-name="P12" loext:marker-style-name="T17"><text:span text:style-name="T17">31403.40</text:span><text:span text:style-name="T17"/></text:p>
          </table:table-cell>
          <table:table-cell table:style-name="Tabla51.A2" office:value-type="string">
            <text:p text:style-name="P12" loext:marker-style-name="T17"><text:span text:style-name="T17">46315.42</text:span><text:span text:style-name="T17"/></text:p>
          </table:table-cell>
          <table:table-cell table:style-name="Tabla51.A2" office:value-type="string">
            <text:p text:style-name="P12" loext:marker-style-name="T17"><text:span text:style-name="T17">57313.45</text:span><text:span text:style-name="T17"/></text:p>
          </table:table-cell>
          <table:table-cell table:style-name="Tabla51.A2" office:value-type="string">
            <text:p text:style-name="P12" loext:marker-style-name="T17"><text:span text:style-name="T17">102865.32</text:span><text:span text:style-name="T17"/></text:p>
          </table:table-cell>
        </table:table-row>
        <text:soft-page-break/>
        <table:table-row table:style-name="Tabla51.1">
          <table:table-cell table:style-name="Tabla51.A2" office:value-type="string">
            <text:p text:style-name="P3" loext:marker-style-name="T17"><text:span text:style-name="T17">Flujo de Financiamiento Neto</text:span><text:span text:style-name="T17"/></text:p>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cell table:style-name="Tabla51.A2" office:value-type="string">
            <text:p text:style-name="P52" loext:marker-style-name="T17"/>
          </table:table-cell>
        </table:table-row>
        <table:table-row table:style-name="Tabla51.1">
          <table:table-cell table:style-name="Tabla51.A2" office:value-type="string">
            <text:p text:style-name="P3" loext:marker-style-name="T17"><text:span text:style-name="T17">Préstamo </text:span><text:span text:style-name="T17"/></text:p>
          </table:table-cell>
          <table:table-cell table:style-name="Tabla51.A2" office:value-type="string">
            <text:p text:style-name="P12" loext:marker-style-name="T17"><text:span text:style-name="T17">1800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8">
          <table:table-cell table:style-name="Tabla51.A2" office:value-type="string">
            <text:p text:style-name="P3" loext:marker-style-name="T17"><text:span text:style-name="T17">Cuota de Capital</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7768.05</text:span><text:span text:style-name="T17"/></text:p>
          </table:table-cell>
          <table:table-cell table:style-name="Tabla51.A2" office:value-type="string">
            <text:p text:style-name="P12" loext:marker-style-name="T17"><text:span text:style-name="T17">-7768.05</text:span><text:span text:style-name="T17"/></text:p>
          </table:table-cell>
          <table:table-cell table:style-name="Tabla51.A2" office:value-type="string">
            <text:p text:style-name="P12" loext:marker-style-name="T17"><text:span text:style-name="T17">-7768.05</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8">
          <table:table-cell table:style-name="Tabla51.A2" office:value-type="string">
            <text:p text:style-name="P3" loext:marker-style-name="T17"><text:span text:style-name="T17">Intereses</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2782.01</text:span><text:span text:style-name="T17"/></text:p>
          </table:table-cell>
          <table:table-cell table:style-name="Tabla51.A2" office:value-type="string">
            <text:p text:style-name="P12" loext:marker-style-name="T17"><text:span text:style-name="T17">-1828.79</text:span><text:span text:style-name="T17"/></text:p>
          </table:table-cell>
          <table:table-cell table:style-name="Tabla51.A2" office:value-type="string">
            <text:p text:style-name="P12" loext:marker-style-name="T17"><text:span text:style-name="T17">-693.35</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8">
          <table:table-cell table:style-name="Tabla51.A2" office:value-type="string">
            <text:p text:style-name="P3" loext:marker-style-name="T17"><text:span text:style-name="T17">Escudo Fiscal de Intereses</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8">
          <table:table-cell table:style-name="Tabla51.A2" office:value-type="string">
            <text:p text:style-name="P3" loext:marker-style-name="T17"><text:span text:style-name="T17">Total, Flujo de Deuda</text:span><text:span text:style-name="T17"/></text:p>
          </table:table-cell>
          <table:table-cell table:style-name="Tabla51.A2" office:value-type="string">
            <text:p text:style-name="P12" loext:marker-style-name="T17"><text:span text:style-name="T17">18000.00</text:span><text:span text:style-name="T17"/></text:p>
          </table:table-cell>
          <table:table-cell table:style-name="Tabla51.A2" office:value-type="string">
            <text:p text:style-name="P12" loext:marker-style-name="T17"><text:span text:style-name="T17">-10550.06</text:span><text:span text:style-name="T17"/></text:p>
          </table:table-cell>
          <table:table-cell table:style-name="Tabla51.A2" office:value-type="string">
            <text:p text:style-name="P12" loext:marker-style-name="T17"><text:span text:style-name="T17">-9596.85</text:span><text:span text:style-name="T17"/></text:p>
          </table:table-cell>
          <table:table-cell table:style-name="Tabla51.A2" office:value-type="string">
            <text:p text:style-name="P12" loext:marker-style-name="T17"><text:span text:style-name="T17">-8461.40</text:span><text:span text:style-name="T17"/></text:p>
          </table:table-cell>
          <table:table-cell table:style-name="Tabla51.A2" office:value-type="string">
            <text:p text:style-name="P12" loext:marker-style-name="T17"><text:span text:style-name="T17">0.00</text:span><text:span text:style-name="T17"/></text:p>
          </table:table-cell>
          <table:table-cell table:style-name="Tabla51.A2" office:value-type="string">
            <text:p text:style-name="P12" loext:marker-style-name="T17"><text:span text:style-name="T17">0.00</text:span><text:span text:style-name="T17"/></text:p>
          </table:table-cell>
        </table:table-row>
        <table:table-row table:style-name="Tabla51.18">
          <table:table-cell table:style-name="Tabla51.A22" office:value-type="string">
            <text:p text:style-name="P3" loext:marker-style-name="T17"><text:span text:style-name="T17">Flujo de Caja Financiero FCF</text:span><text:span text:style-name="T17"/></text:p>
          </table:table-cell>
          <table:table-cell table:style-name="Tabla51.A22" office:value-type="string">
            <text:p text:style-name="P12" loext:marker-style-name="T17"><text:span text:style-name="T17">-6291.32</text:span><text:span text:style-name="T17"/></text:p>
          </table:table-cell>
          <table:table-cell table:style-name="Tabla51.A22" office:value-type="string">
            <text:p text:style-name="P12" loext:marker-style-name="T17"><text:span text:style-name="T17">13255.31</text:span><text:span text:style-name="T17"/></text:p>
          </table:table-cell>
          <table:table-cell table:style-name="Tabla51.A22" office:value-type="string">
            <text:p text:style-name="P12" loext:marker-style-name="T17"><text:span text:style-name="T17">21806.55</text:span><text:span text:style-name="T17"/></text:p>
          </table:table-cell>
          <table:table-cell table:style-name="Tabla51.A22" office:value-type="string">
            <text:p text:style-name="P12" loext:marker-style-name="T17"><text:span text:style-name="T17">37854.02</text:span><text:span text:style-name="T17"/></text:p>
          </table:table-cell>
          <table:table-cell table:style-name="Tabla51.A22" office:value-type="string">
            <text:p text:style-name="P12" loext:marker-style-name="T17"><text:span text:style-name="T17">57313.45</text:span><text:span text:style-name="T17"/></text:p>
          </table:table-cell>
          <table:table-cell table:style-name="Tabla51.A22" office:value-type="string">
            <text:p text:style-name="P12" loext:marker-style-name="T17"><text:span text:style-name="T17">102865.32</text:span><text:span text:style-name="T17"/></text:p>
          </table:table-cell>
        </table:table-row>
      </table:table>
      <text:p text:style-name="Notas_20_APA" loext:marker-style-name="T4"><text:span text:style-name="T15">Nota.</text:span><text:span text:style-name="T4"> Elaboración propia</text:span></text:p>
      <text:p text:style-name="P127" loext:marker-style-name="T4"><text:span text:style-name="T4">Este flujo de caja toma en cuenta solo el dinero con el que se ha financiado la empresa StampAdek, más no toma el financiamiento de la inversión por entidades financieras u otros. Se observa que el Flujo de Caja Económico es rentable positivo desde el primer año, esto significa que el proyecto es rentable por sí mismo.</text:span><text:span text:style-name="T4"/></text:p>
      <text:h text:style-name="P78" text:outline-level="2" loext:marker-style-name="T4"><text:bookmark-start text:name="_Toc106699198"/><text:span text:style-name="T4">8.3. Evaluación Económica y Financiera</text:span><text:bookmark-end text:name="_Toc106699198"/><text:span text:style-name="T4"/></text:h>
      <text:p text:style-name="P116" loext:marker-style-name="T4"><text:span text:style-name="T4"><text:s text:c="10"/>Para realizar nuestra evaluación económica, requeriremos de los métodos que nos ayudará a determinar la rentabilidad del proyecto para ello hallarnos los indicadores correspondientes, en primer lugar, determinaremos el valor actual neto económico (VANE), donde tomaremos en cuenta los flujos caja económica, la tasa de capital propio y calcularemos median la formula </text:span><draw:frame draw:name="Objeto3" text:anchor-type="as-char" svg:width="2.484cm" svg:height="1.191cm" draw:z-index="63"><draw:object xlink:href="./Object 5" xlink:type="simple" xlink:show="embed" xlink:actuate="onLoad"/><draw:image xlink:href="./ObjectReplacements/Object 5" xlink:type="simple" xlink:show="embed" xlink:actuate="onLoad"/></draw:frame><text:span text:style-name="T23"><text:s text:c="28"/>dado el cálculo, nuestro VANE es igual a </text:span><text:span text:style-name="T45">44649.93</text:span><text:span text:style-name="T4">. Este valor nos muestra que nuestro proyecto es rentable ya que el valor es positivo</text:span><text:span text:style-name="T64"> </text:span><text:span text:style-name="T4">y cumple con las mínimas condiciones establecidas. </text:span></text:p>
      <text:p text:style-name="P206" loext:marker-style-name="T11"/>
      <text:p text:style-name="TÍTULO_20_Tablas_20_y_20_Figuras" loext:marker-style-name="T51"><text:bookmark-start text:name="_Toc106698923"/><text:span text:style-name="T51">Tabla </text:span><text:bookmark-end text:name="_Toc106698923"/><text:span text:style-name="T51"><text:sequence text:ref-name="refTable24" text:name="Table" text:formula="ooow:Table+1" style:num-format="1">25</text:sequence></text:span><text:span text:style-name="T51"><text:s/></text:span></text:p>
      <text:p text:style-name="TÍTULO_20_Tablas_20_y_20_Figuras">Cálculo del Valor Actual Neto Económico.</text:p>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column table:style-name="Tabla53.G"/>
        <table:table-column table:style-name="Tabla53.H"/>
        <table:table-column table:style-name="Tabla53.G"/>
        <table:table-column table:style-name="Tabla53.J"/>
        <table:table-column table:style-name="Tabla53.K"/>
        <table:table-row table:style-name="Tabla53.1">
          <table:table-cell table:style-name="Tabla53.A1" office:value-type="string">
            <text:p text:style-name="P15" loext:marker-style-name="T4"><text:span text:style-name="T4">VANE</text:span><text:span text:style-name="T4"/></text:p>
          </table:table-cell>
          <table:table-cell table:style-name="Tabla53.A1" office:value-type="string">
            <text:p text:style-name="P15" loext:marker-style-name="T4"><text:span text:style-name="T4">44649.93</text:span><text:span text:style-name="T4"/></text:p>
          </table:table-cell>
          <table:table-cell table:style-name="Tabla53.A1" office:value-type="string">
            <text:p text:style-name="P15" loext:marker-style-name="T4"><text:span text:style-name="T4">Soles</text:span><text:span text:style-name="T4"/></text:p>
          </table:table-cell>
          <table:table-cell table:style-name="Tabla53.A1" table:number-columns-spanned="2" office:value-type="string">
            <text:p text:style-name="P54" loext:marker-style-name="T4"/>
          </table:table-cell>
          <table:covered-table-cell/>
          <table:table-cell table:style-name="Tabla53.A1" table:number-columns-spanned="2" office:value-type="string">
            <text:p text:style-name="P54" loext:marker-style-name="T4"/>
          </table:table-cell>
          <table:covered-table-cell/>
          <table:table-cell table:style-name="Tabla53.A1" table:number-columns-spanned="2" office:value-type="string">
            <text:p text:style-name="P54" loext:marker-style-name="T4"/>
          </table:table-cell>
          <table:covered-table-cell/>
          <table:table-cell table:style-name="Tabla53.J1" office:value-type="string">
            <text:p text:style-name="P54" loext:marker-style-name="T4"/>
          </table:table-cell>
          <table:table-cell table:style-name="Tabla53.K1" office:value-type="string">
            <text:p text:style-name="P28"/>
          </table:table-cell>
        </table:table-row>
        <table:table-row table:style-name="Tabla53.1">
          <table:table-cell table:style-name="Tabla53.K1" office:value-type="string">
            <text:p text:style-name="P15" loext:marker-style-name="T19"><text:span text:style-name="T4">FCEt</text:span><text:span text:style-name="T19"/></text:p>
          </table:table-cell>
          <table:table-cell table:style-name="Tabla53.K1" office:value-type="string">
            <text:p text:style-name="P54" loext:marker-style-name="T4"/>
          </table:table-cell>
          <table:table-cell table:style-name="Tabla53.K1" table:number-columns-spanned="2" office:value-type="string">
            <text:p text:style-name="P15" loext:marker-style-name="T4"><text:span text:style-name="T4">Flujo de caja económica e el periodo t</text:span><text:span text:style-name="T4"/></text:p>
          </table:table-cell>
          <table:covered-table-cell/>
          <table:table-cell table:style-name="Tabla53.K1" table:number-columns-spanned="2" office:value-type="string">
            <text:p text:style-name="P54" loext:marker-style-name="T4"/>
          </table:table-cell>
          <table:covered-table-cell/>
          <table:table-cell table:style-name="Tabla53.G2" table:number-columns-spanned="2" office:value-type="string">
            <text:p text:style-name="P54" loext:marker-style-name="T4"/>
          </table:table-cell>
          <table:covered-table-cell/>
          <table:table-cell table:style-name="Tabla53.K1" table:number-columns-spanned="2" office:value-type="string">
            <text:p text:style-name="P54" loext:marker-style-name="T4"/>
          </table:table-cell>
          <table:covered-table-cell/>
          <table:table-cell table:style-name="Tabla53.K1" office:value-type="string">
            <text:p text:style-name="P28"/>
          </table:table-cell>
        </table:table-row>
        <table:table-row table:style-name="Tabla53.1">
          <table:table-cell table:style-name="Tabla53.K1" office:value-type="string">
            <text:p text:style-name="P15" loext:marker-style-name="T4"><text:span text:style-name="T4">Ku</text:span><text:span text:style-name="T4"/></text:p>
          </table:table-cell>
          <table:table-cell table:style-name="Tabla53.K1" office:value-type="string">
            <text:p text:style-name="P15" loext:marker-style-name="T4"><text:span text:style-name="T4">22.47%</text:span><text:span text:style-name="T4"/></text:p>
          </table:table-cell>
          <table:table-cell table:style-name="Tabla53.K1" table:number-columns-spanned="7" office:value-type="string">
            <text:p text:style-name="P15" loext:marker-style-name="T4"><text:span text:style-name="T4">Costo de capital propio des apalancado</text:span><text:span text:style-name="T4"/></text:p>
          </table:table-cell>
          <table:covered-table-cell/>
          <table:covered-table-cell/>
          <table:covered-table-cell/>
          <table:covered-table-cell/>
          <table:covered-table-cell/>
          <table:covered-table-cell/>
          <table:table-cell table:style-name="Tabla53.K1" office:value-type="string">
            <text:p text:style-name="P54" loext:marker-style-name="T4"/>
          </table:table-cell>
          <table:table-cell table:style-name="Tabla53.K1" office:value-type="string">
            <text:p text:style-name="P28"/>
          </table:table-cell>
        </table:table-row>
        <table:table-row table:style-name="Tabla53.1">
          <table:table-cell table:style-name="Tabla53.K1" office:value-type="string">
            <text:p text:style-name="P15" loext:marker-style-name="T4"><text:span text:style-name="T4">Io</text:span><text:span text:style-name="T4"/></text:p>
          </table:table-cell>
          <table:table-cell table:style-name="Tabla53.K1" office:value-type="string">
            <text:p text:style-name="P15" loext:marker-style-name="T4"><text:span text:style-name="T4">24291.32</text:span><text:span text:style-name="T4"/></text:p>
          </table:table-cell>
          <table:table-cell table:style-name="Tabla53.K1" table:number-columns-spanned="7" office:value-type="string">
            <text:p text:style-name="P15" loext:marker-style-name="T4"><text:span text:style-name="T4">Inversión total en el periodo cero</text:span><text:span text:style-name="T4"/></text:p>
          </table:table-cell>
          <table:covered-table-cell/>
          <table:covered-table-cell/>
          <table:covered-table-cell/>
          <table:covered-table-cell/>
          <table:covered-table-cell/>
          <table:covered-table-cell/>
          <table:table-cell table:style-name="Tabla53.K1" office:value-type="string">
            <text:p text:style-name="P54" loext:marker-style-name="T4"/>
          </table:table-cell>
          <table:table-cell table:style-name="Tabla53.K1" office:value-type="string">
            <text:p text:style-name="P13"/>
          </table:table-cell>
        </table:table-row>
        <table:table-row table:style-name="Tabla53.1">
          <table:table-cell table:style-name="Tabla53.K1" office:value-type="string">
            <text:p text:style-name="P15" loext:marker-style-name="T4"><text:span text:style-name="T4">t</text:span><text:span text:style-name="T4"/></text:p>
          </table:table-cell>
          <table:table-cell table:style-name="Tabla53.K1" office:value-type="string">
            <text:p text:style-name="P15" loext:marker-style-name="T4"><text:span text:style-name="T4">5</text:span><text:span text:style-name="T4"/></text:p>
          </table:table-cell>
          <table:table-cell table:style-name="Tabla53.K1" table:number-columns-spanned="5" office:value-type="string">
            <text:p text:style-name="P15" loext:marker-style-name="T4"><text:span text:style-name="T4">Periodo de tiempo</text:span><text:span text:style-name="T4"/></text:p>
          </table:table-cell>
          <table:covered-table-cell/>
          <table:covered-table-cell/>
          <table:covered-table-cell/>
          <table:covered-table-cell/>
          <table:table-cell table:style-name="Tabla53.K1" table:number-columns-spanned="2" office:value-type="string">
            <text:p text:style-name="P54" loext:marker-style-name="T4"/>
          </table:table-cell>
          <table:covered-table-cell/>
          <table:table-cell table:style-name="Tabla53.K1" office:value-type="string">
            <text:p text:style-name="P54" loext:marker-style-name="T4"/>
          </table:table-cell>
          <table:table-cell table:style-name="Tabla53.K1" office:value-type="string">
            <text:p text:style-name="P13"/>
          </table:table-cell>
        </table:table-row>
        <table:table-row table:style-name="Tabla53.1">
          <table:table-cell table:style-name="Tabla53.K1" office:value-type="string">
            <text:p text:style-name="P15" loext:marker-style-name="T4"><text:span text:style-name="T4">n</text:span><text:span text:style-name="T4"/></text:p>
          </table:table-cell>
          <table:table-cell table:style-name="Tabla53.K1" office:value-type="string">
            <text:p text:style-name="P15" loext:marker-style-name="T4"><text:span text:style-name="T4">5</text:span><text:span text:style-name="T4"/></text:p>
          </table:table-cell>
          <table:table-cell table:style-name="Tabla53.K1" table:number-columns-spanned="3" office:value-type="string">
            <text:p text:style-name="P15" loext:marker-style-name="T4"><text:span text:style-name="T4">Periodo de horizonte de evaluación del proyecto</text:span><text:span text:style-name="T4"/></text:p>
          </table:table-cell>
          <table:covered-table-cell/>
          <table:covered-table-cell/>
          <table:table-cell table:style-name="Tabla53.K1" table:number-columns-spanned="2" office:value-type="string">
            <text:p text:style-name="P54" loext:marker-style-name="T4"/>
          </table:table-cell>
          <table:covered-table-cell/>
          <table:table-cell table:style-name="Tabla53.G2" table:number-columns-spanned="2" office:value-type="string">
            <text:p text:style-name="P54" loext:marker-style-name="T4"/>
          </table:table-cell>
          <table:covered-table-cell/>
          <table:table-cell table:style-name="Tabla53.G2" office:value-type="string">
            <text:p text:style-name="P54" loext:marker-style-name="T4"/>
          </table:table-cell>
          <table:table-cell table:style-name="Tabla53.K1" office:value-type="string">
            <text:p text:style-name="P28"/>
          </table:table-cell>
        </table:table-row>
        <table:table-row table:style-name="Tabla53.1">
          <table:table-cell table:style-name="Tabla53.A7" office:value-type="string">
            <text:p text:style-name="P54" loext:marker-style-name="T4"/>
          </table:table-cell>
          <table:table-cell table:style-name="Tabla53.A7" office:value-type="string">
            <text:p text:style-name="P54" loext:marker-style-name="T4"/>
          </table:table-cell>
          <table:table-cell table:style-name="Tabla53.A7" table:number-columns-spanned="7" office:value-type="string">
            <text:p text:style-name="P54" loext:marker-style-name="T4"/>
          </table:table-cell>
          <table:covered-table-cell/>
          <table:covered-table-cell/>
          <table:covered-table-cell/>
          <table:covered-table-cell/>
          <table:covered-table-cell/>
          <table:covered-table-cell/>
          <table:table-cell table:style-name="Tabla53.A7" office:value-type="string">
            <text:p text:style-name="P54" loext:marker-style-name="T4"/>
          </table:table-cell>
          <table:table-cell table:style-name="Tabla53.K1" office:value-type="string">
            <text:p text:style-name="P28"/>
          </table:table-cell>
        </table:table-row>
      </table:table>
      <text:p text:style-name="P109" loext:marker-style-name="T4"><text:span text:style-name="T15">Nota.</text:span><text:span text:style-name="T4"> Elaboración propia.</text:span></text:p>
      <text:p text:style-name="P109" loext:marker-style-name="T76"><text:span text:style-name="T4"><text:s text:c="2"/></text:span><text:span text:style-name="T76"/></text:p>
      <text:p text:style-name="P99" loext:marker-style-name="T65"><text:span text:style-name="T74"><text:s text:c="11"/></text:span><text:span text:style-name="T24">5.3.1.</text:span><text:span text:style-name="T4"> Tasas Interna de Retorno (TIRE)</text:span></text:p>
      <text:p text:style-name="P116" loext:marker-style-name="T10"><text:span text:style-name="T10"><text:s text:c="12"/>Este valor se expresará en términos de porcentual es cuando VANE es igual a cero, este valor nos muestra el máximo rendimiento que se obtendrá sobre la </text:span><text:soft-page-break/><text:span text:style-name="T10">inversión total, para determinar dicho valor debemos remplazar los valores en la siguiente formula </text:span><draw:frame draw:name="Objeto4" text:anchor-type="as-char" svg:width="3.059cm" svg:height="1.191cm" draw:z-index="64"><draw:object xlink:href="./Object 6" xlink:type="simple" xlink:show="embed" xlink:actuate="onLoad"/><draw:image xlink:href="./ObjectReplacements/Object 6" xlink:type="simple" xlink:show="embed" xlink:actuate="onLoad"/></draw:frame><text:span text:style-name="T10"><text:s/>. <text:s/>Este indicador representa el máximo retorno que los flujos puedan otorgarnos sobre la inversión total. Realizando el cálculo nuestro TIRE es de 67.18</text:span><text:span text:style-name="T64">% <text:s text:c="2"/></text:span><text:span text:style-name="T4">dado este valor podemos afirmar que nuestro proyecto es rentable. </text:span></text:p>
      <text:p text:style-name="P206" loext:marker-style-name="T11"/>
      <text:p text:style-name="TÍTULO_20_Tablas_20_y_20_Figuras" loext:marker-style-name="T51"><text:bookmark-start text:name="_Toc106698924"/><text:span text:style-name="T51">Tabla </text:span><text:bookmark-end text:name="_Toc106698924"/><text:span text:style-name="T51"><text:sequence text:ref-name="refTable25" text:name="Table" text:formula="ooow:Table+1" style:num-format="1">26</text:sequence></text:span><text:span text:style-name="T51"><text:s/></text:span></text:p>
      <text:p text:style-name="TÍTULO_20_Tablas_20_y_20_Figuras">Cálculo de la Tasa Interna de Retorno económico.</text:p>
      <table:table table:name="Tabla54" table:style-name="Tabla54">
        <table:table-column table:style-name="Tabla54.A"/>
        <table:table-column table:style-name="Tabla54.B"/>
        <table:table-column table:style-name="Tabla54.C"/>
        <table:table-column table:style-name="Tabla54.D"/>
        <table:table-column table:style-name="Tabla54.E"/>
        <table:table-column table:style-name="Tabla54.F" table:number-columns-repeated="2"/>
        <table:table-column table:style-name="Tabla54.H"/>
        <table:table-column table:style-name="Tabla54.I"/>
        <table:table-column table:style-name="Tabla54.J"/>
        <table:table-column table:style-name="Tabla54.K"/>
        <table:table-column table:style-name="Tabla54.L"/>
        <table:table-column table:style-name="Tabla54.M"/>
        <table:table-column table:style-name="Tabla54.N"/>
        <table:table-row table:style-name="Tabla54.1">
          <table:table-cell table:style-name="Tabla54.A1" office:value-type="string">
            <text:p text:style-name="P15" loext:marker-style-name="T4"><text:span text:style-name="T4">TIRE</text:span><text:span text:style-name="T4"/></text:p>
          </table:table-cell>
          <table:table-cell table:style-name="Tabla54.A1" office:value-type="string">
            <text:p text:style-name="P15" loext:marker-style-name="T4"><text:span text:style-name="T4">67.18%</text:span><text:span text:style-name="T4"/></text:p>
          </table:table-cell>
          <table:table-cell table:style-name="Tabla54.A1" table:number-columns-spanned="2" office:value-type="string">
            <text:p text:style-name="P13" loext:marker-style-name="T4"><text:span text:style-name="T4">Promedio anual</text:span><text:span text:style-name="T4"/></text:p>
          </table:table-cell>
          <table:covered-table-cell/>
          <table:table-cell table:style-name="Tabla54.A1" table:number-columns-spanned="2" office:value-type="string">
            <text:p text:style-name="P54" loext:marker-style-name="T4"/>
          </table:table-cell>
          <table:covered-table-cell/>
          <table:table-cell table:style-name="Tabla54.A1" table:number-columns-spanned="2" office:value-type="string">
            <text:p text:style-name="P54" loext:marker-style-name="T4"/>
          </table:table-cell>
          <table:covered-table-cell/>
          <table:table-cell table:style-name="Tabla54.I1" office:value-type="string">
            <text:p text:style-name="P54" loext:marker-style-name="T4"/>
          </table:table-cell>
          <table:table-cell table:style-name="Tabla54.A1" table:number-columns-spanned="2" office:value-type="string">
            <text:p text:style-name="P54" loext:marker-style-name="T4"/>
          </table:table-cell>
          <table:covered-table-cell/>
          <table:table-cell table:style-name="Tabla54.L1" office:value-type="string">
            <text:p text:style-name="P28"/>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15" loext:marker-style-name="T19"><text:span text:style-name="T4">FCEt</text:span><text:span text:style-name="T19"/></text:p>
          </table:table-cell>
          <table:table-cell table:style-name="Tabla54.L1" table:number-columns-spanned="2" office:value-type="string">
            <text:p text:style-name="P54" loext:marker-style-name="T4"/>
          </table:table-cell>
          <table:covered-table-cell/>
          <table:table-cell table:style-name="Tabla54.L1" table:number-columns-spanned="4" office:value-type="string">
            <text:p text:style-name="P15" loext:marker-style-name="T4"><text:span text:style-name="T4">Flujo de caja económico e el periodo t</text:span><text:span text:style-name="T4"/></text:p>
          </table:table-cell>
          <table:covered-table-cell/>
          <table:covered-table-cell/>
          <table:covered-table-cell/>
          <table:table-cell table:style-name="Tabla54.L1" table:number-columns-spanned="3" office:value-type="string">
            <text:p text:style-name="P54" loext:marker-style-name="T4"/>
          </table:table-cell>
          <table:covered-table-cell/>
          <table:covered-table-cell/>
          <table:table-cell table:style-name="Tabla54.K2" office:value-type="string">
            <text:p text:style-name="P54" loext:marker-style-name="T4"/>
          </table:table-cell>
          <table:table-cell table:style-name="Tabla54.L1" office:value-type="string">
            <text:p text:style-name="P28"/>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15" loext:marker-style-name="T4"><text:span text:style-name="T4">Ku</text:span><text:span text:style-name="T4"/></text:p>
          </table:table-cell>
          <table:table-cell table:style-name="Tabla54.L1" table:number-columns-spanned="2" office:value-type="string">
            <text:p text:style-name="P15" loext:marker-style-name="T4"><text:span text:style-name="T4">22.47%</text:span><text:span text:style-name="T4"/></text:p>
          </table:table-cell>
          <table:covered-table-cell/>
          <table:table-cell table:style-name="Tabla54.L1" table:number-columns-spanned="7" office:value-type="string">
            <text:p text:style-name="P15" loext:marker-style-name="T4"><text:span text:style-name="T4">Costo de capital propio des apalancado</text:span><text:span text:style-name="T4"/></text:p>
          </table:table-cell>
          <table:covered-table-cell/>
          <table:covered-table-cell/>
          <table:covered-table-cell/>
          <table:covered-table-cell/>
          <table:covered-table-cell/>
          <table:covered-table-cell/>
          <table:table-cell table:style-name="Tabla54.L1" office:value-type="string">
            <text:p text:style-name="P54" loext:marker-style-name="T4"/>
          </table:table-cell>
          <table:table-cell table:style-name="Tabla54.L1" office:value-type="string">
            <text:p text:style-name="P28"/>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15" loext:marker-style-name="T4"><text:span text:style-name="T4">Io</text:span><text:span text:style-name="T4"/></text:p>
          </table:table-cell>
          <table:table-cell table:style-name="Tabla54.L1" table:number-columns-spanned="2" office:value-type="string">
            <text:p text:style-name="P15" loext:marker-style-name="T4"><text:span text:style-name="T4">24291.32</text:span><text:span text:style-name="T4"/></text:p>
          </table:table-cell>
          <table:covered-table-cell/>
          <table:table-cell table:style-name="Tabla54.L1" table:number-columns-spanned="7" office:value-type="string">
            <text:p text:style-name="P15" loext:marker-style-name="T4"><text:span text:style-name="T4">Inversión total en el periodo cero</text:span><text:span text:style-name="T4"/></text:p>
          </table:table-cell>
          <table:covered-table-cell/>
          <table:covered-table-cell/>
          <table:covered-table-cell/>
          <table:covered-table-cell/>
          <table:covered-table-cell/>
          <table:covered-table-cell/>
          <table:table-cell table:style-name="Tabla54.L1" office:value-type="string">
            <text:p text:style-name="P54" loext:marker-style-name="T4"/>
          </table:table-cell>
          <table:table-cell table:style-name="Tabla54.L1" office:value-type="string">
            <text:p text:style-name="P13"/>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15" loext:marker-style-name="T4"><text:span text:style-name="T4">t</text:span><text:span text:style-name="T4"/></text:p>
          </table:table-cell>
          <table:table-cell table:style-name="Tabla54.L1" table:number-columns-spanned="2" office:value-type="string">
            <text:p text:style-name="P15" loext:marker-style-name="T4"><text:span text:style-name="T4">5</text:span><text:span text:style-name="T4"/></text:p>
          </table:table-cell>
          <table:covered-table-cell/>
          <table:table-cell table:style-name="Tabla54.L1" table:number-columns-spanned="4" office:value-type="string">
            <text:p text:style-name="P15" loext:marker-style-name="T4"><text:span text:style-name="T4">Periodo de tiempo</text:span><text:span text:style-name="T4"/></text:p>
          </table:table-cell>
          <table:covered-table-cell/>
          <table:covered-table-cell/>
          <table:covered-table-cell/>
          <table:table-cell table:style-name="Tabla54.L1" table:number-columns-spanned="3" office:value-type="string">
            <text:p text:style-name="P54" loext:marker-style-name="T4"/>
          </table:table-cell>
          <table:covered-table-cell/>
          <table:covered-table-cell/>
          <table:table-cell table:style-name="Tabla54.L1" office:value-type="string">
            <text:p text:style-name="P54" loext:marker-style-name="T4"/>
          </table:table-cell>
          <table:table-cell table:style-name="Tabla54.L1" office:value-type="string">
            <text:p text:style-name="P13"/>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15" loext:marker-style-name="T4"><text:span text:style-name="T4">n</text:span><text:span text:style-name="T4"/></text:p>
          </table:table-cell>
          <table:table-cell table:style-name="Tabla54.L1" table:number-columns-spanned="2" office:value-type="string">
            <text:p text:style-name="P15" loext:marker-style-name="T4"><text:span text:style-name="T4">5</text:span><text:span text:style-name="T4"/></text:p>
          </table:table-cell>
          <table:covered-table-cell/>
          <table:table-cell table:style-name="Tabla54.L1" table:number-columns-spanned="2" office:value-type="string">
            <text:p text:style-name="P15" loext:marker-style-name="T4"><text:span text:style-name="T4">Periodo de horizonte de evolución del proyecto</text:span><text:span text:style-name="T4"/></text:p>
          </table:table-cell>
          <table:covered-table-cell/>
          <table:table-cell table:style-name="Tabla54.L1" table:number-columns-spanned="2" office:value-type="string">
            <text:p text:style-name="P54" loext:marker-style-name="T4"/>
          </table:table-cell>
          <table:covered-table-cell/>
          <table:table-cell table:style-name="Tabla54.K2" table:number-columns-spanned="3" office:value-type="string">
            <text:p text:style-name="P54" loext:marker-style-name="T4"/>
          </table:table-cell>
          <table:covered-table-cell/>
          <table:covered-table-cell/>
          <table:table-cell table:style-name="Tabla54.K2" office:value-type="string">
            <text:p text:style-name="P54" loext:marker-style-name="T4"/>
          </table:table-cell>
          <table:table-cell table:style-name="Tabla54.L1" office:value-type="string">
            <text:p text:style-name="P28"/>
          </table:table-cell>
          <table:table-cell table:style-name="Tabla54.L1" office:value-type="string">
            <text:p text:style-name="P28"/>
          </table:table-cell>
          <table:table-cell table:style-name="Tabla54.L1" office:value-type="string">
            <text:p text:style-name="P28"/>
          </table:table-cell>
        </table:table-row>
        <table:table-row table:style-name="Tabla54.1">
          <table:table-cell table:style-name="Tabla54.L1" office:value-type="string">
            <text:p text:style-name="P57" loext:marker-style-name="T4"/>
          </table:table-cell>
          <table:table-cell table:style-name="Tabla54.L1" table:number-columns-spanned="2" office:value-type="string">
            <text:p text:style-name="P54" loext:marker-style-name="T4"/>
          </table:table-cell>
          <table:covered-table-cell/>
          <table:table-cell table:style-name="Tabla54.L1" table:number-columns-spanned="7" office:value-type="string">
            <text:p text:style-name="P54" loext:marker-style-name="T4"/>
          </table:table-cell>
          <table:covered-table-cell/>
          <table:covered-table-cell/>
          <table:covered-table-cell/>
          <table:covered-table-cell/>
          <table:covered-table-cell/>
          <table:covered-table-cell/>
          <table:table-cell table:style-name="Tabla54.L1" office:value-type="string">
            <text:p text:style-name="P54" loext:marker-style-name="T4"/>
          </table:table-cell>
          <table:table-cell table:style-name="Tabla54.L1" office:value-type="string">
            <text:p text:style-name="P13"/>
          </table:table-cell>
          <table:table-cell table:style-name="Tabla54.L1" office:value-type="string">
            <text:p text:style-name="P13"/>
          </table:table-cell>
          <table:table-cell table:style-name="Tabla54.L1" office:value-type="string">
            <text:p text:style-name="P13"/>
          </table:table-cell>
        </table:table-row>
        <table:table-row table:style-name="Tabla54.1">
          <table:table-cell table:style-name="Tabla54.A8" office:value-type="string">
            <text:p text:style-name="P15" loext:marker-style-name="T4"><text:span text:style-name="T4">PEC</text:span><text:span text:style-name="T4"/></text:p>
          </table:table-cell>
          <table:table-cell table:style-name="Tabla54.A8" table:number-columns-spanned="2" office:value-type="string">
            <text:p text:style-name="P15" loext:marker-style-name="T4"><text:span text:style-name="T4">215</text:span><text:span text:style-name="T4"/></text:p>
          </table:table-cell>
          <table:covered-table-cell/>
          <table:table-cell table:style-name="Tabla54.A8" office:value-type="string">
            <text:p text:style-name="P15" loext:marker-style-name="T4"><text:span text:style-name="T4">Unidad/periodo</text:span><text:span text:style-name="T4"/></text:p>
          </table:table-cell>
          <table:table-cell table:style-name="Tabla54.A8" table:number-columns-spanned="2" office:value-type="string">
            <text:p text:style-name="P54" loext:marker-style-name="T4"/>
          </table:table-cell>
          <table:covered-table-cell/>
          <table:table-cell table:style-name="Tabla54.A8" table:number-columns-spanned="2" office:value-type="string">
            <text:p text:style-name="P54" loext:marker-style-name="T4"/>
          </table:table-cell>
          <table:covered-table-cell/>
          <table:table-cell table:style-name="Tabla54.I8" office:value-type="string">
            <text:p text:style-name="P54" loext:marker-style-name="T4"/>
          </table:table-cell>
          <table:table-cell table:style-name="Tabla54.A8" table:number-columns-spanned="2" office:value-type="string">
            <text:p text:style-name="P54" loext:marker-style-name="T4"/>
          </table:table-cell>
          <table:covered-table-cell/>
          <table:table-cell table:style-name="Tabla54.L1" office:value-type="string">
            <text:p text:style-name="P28"/>
          </table:table-cell>
          <table:table-cell table:style-name="Tabla54.L1" office:value-type="string">
            <text:p text:style-name="P28"/>
          </table:table-cell>
          <table:table-cell table:style-name="Tabla54.L1" office:value-type="string">
            <text:p text:style-name="P28"/>
          </table:table-cell>
        </table:table-row>
      </table:table>
      <text:p text:style-name="P109" loext:marker-style-name="T4"><text:span text:style-name="T4">Nota: elaboración propia.</text:span><text:span text:style-name="T4"/></text:p>
      <text:p text:style-name="P116" loext:marker-style-name="T4"><text:span text:style-name="T4">5.3.2. Valor actual neto financiero (VANF)</text:span><text:span text:style-name="T4"/></text:p>
      <text:p text:style-name="P116" loext:marker-style-name="T4"><text:span text:style-name="T10"><text:s text:c="11"/>Este método de evaluación nos mide las ganancias o pérdidas en términos de flujo financiero, para determinar este valor requeriremos del </text:span><text:span text:style-name="T4">flujo de caja financiera y del flujo de la caja de la deuda y la KWACC. Este indicador nos mostrará el valor del negocio en términos monetarios. <text:s/>Para determinar el valor remplazamos los valores en la siguiente formula <text:s/></text:span><draw:frame draw:name="Objeto5" text:anchor-type="as-char" svg:width="3.127cm" svg:height="1.191cm" draw:z-index="65"><draw:object xlink:href="./Object 7" xlink:type="simple" xlink:show="embed" xlink:actuate="onLoad"/><draw:image xlink:href="./ObjectReplacements/Object 7" xlink:type="simple" xlink:show="embed" xlink:actuate="onLoad"/></draw:frame><text:span text:style-name="T46">. Calculando el valor, nuestro VANF es de </text:span><text:span text:style-name="T45">62761.68</text:span><text:span text:style-name="T46"> dando lugar a una rentabilidad financiera. </text:span></text:p>
      <text:p text:style-name="P206" loext:marker-style-name="T11"/>
      <text:p text:style-name="TÍTULO_20_Tablas_20_y_20_Figuras" loext:marker-style-name="T51"><text:bookmark-start text:name="_Toc106698925"/><text:soft-page-break/><text:span text:style-name="T51">Tabla </text:span><text:bookmark-end text:name="_Toc106698925"/><text:span text:style-name="T51"><text:sequence text:ref-name="refTable26" text:name="Table" text:formula="ooow:Table+1" style:num-format="1">27</text:sequence></text:span><text:span text:style-name="T51"><text:s/></text:span></text:p>
      <text:p text:style-name="TÍTULO_20_Tablas_20_y_20_Figuras">Cálculo del Valor Actual Neto Financiero.</text:p>
      <table:table table:name="Tabla55" table:style-name="Tabla55">
        <table:table-column table:style-name="Tabla55.A"/>
        <table:table-column table:style-name="Tabla55.B"/>
        <table:table-column table:style-name="Tabla55.C"/>
        <table:table-column table:style-name="Tabla55.D"/>
        <table:table-column table:style-name="Tabla55.E"/>
        <table:table-column table:style-name="Tabla55.F"/>
        <table:table-column table:style-name="Tabla55.G"/>
        <table:table-row table:style-name="Tabla55.1">
          <table:table-cell table:style-name="Tabla55.A1" table:number-columns-spanned="7" office:value-type="string">
            <text:p text:style-name="P13" loext:marker-style-name="T4"><text:span text:style-name="T4">Valor actual neto financiero (VANF)</text:span><text:span text:style-name="T4"/></text:p>
          </table:table-cell>
          <table:covered-table-cell/>
          <table:covered-table-cell/>
          <table:covered-table-cell/>
          <table:covered-table-cell/>
          <table:covered-table-cell/>
          <table:covered-table-cell/>
        </table:table-row>
        <table:table-row table:style-name="Tabla55.2">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row>
        <table:table-row table:style-name="Tabla55.1">
          <table:table-cell table:style-name="Tabla55.A2" office:value-type="string">
            <text:p text:style-name="P15" loext:marker-style-name="T4"><text:span text:style-name="T4">VANF</text:span><text:span text:style-name="T4"/></text:p>
          </table:table-cell>
          <table:table-cell table:style-name="Tabla55.A2" table:number-columns-spanned="2" office:value-type="string">
            <text:p text:style-name="P13" loext:marker-style-name="T4"><text:span text:style-name="T4">62761.68</text:span><text:span text:style-name="T4"/></text:p>
          </table:table-cell>
          <table:covered-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row>
        <table:table-row table:style-name="Tabla55.1">
          <table:table-cell table:style-name="Tabla55.A2" office:value-type="string">
            <text:p text:style-name="P15" loext:marker-style-name="T4"><text:span text:style-name="T4">FCFt</text:span><text:span text:style-name="T4"/></text:p>
          </table:table-cell>
          <table:table-cell table:style-name="Tabla55.A2" office:value-type="string">
            <text:p text:style-name="P54" loext:marker-style-name="T4"/>
          </table:table-cell>
          <table:table-cell table:style-name="Tabla55.A2" table:number-columns-spanned="3" office:value-type="string">
            <text:p text:style-name="P15" loext:marker-style-name="T4"><text:span text:style-name="T4">Flujo de caja financiero del periodo</text:span><text:span text:style-name="T4"/></text:p>
          </table:table-cell>
          <table:covered-table-cell/>
          <table:covered-table-cell/>
          <table:table-cell table:style-name="Tabla55.A2" office:value-type="string">
            <text:p text:style-name="P54" loext:marker-style-name="T4"/>
          </table:table-cell>
          <table:table-cell table:style-name="Tabla55.A2" office:value-type="string">
            <text:p text:style-name="P54" loext:marker-style-name="T4"/>
          </table:table-cell>
        </table:table-row>
        <table:table-row table:style-name="Tabla55.1">
          <table:table-cell table:style-name="Tabla55.A2" office:value-type="string">
            <text:p text:style-name="P15" loext:marker-style-name="T4"><text:span text:style-name="T4">Kwacc</text:span><text:span text:style-name="T4"/></text:p>
          </table:table-cell>
          <table:table-cell table:style-name="Tabla55.A2" office:value-type="string">
            <text:p text:style-name="P13" loext:marker-style-name="T4"><text:span text:style-name="T4">21.53%</text:span><text:span text:style-name="T4"/></text:p>
          </table:table-cell>
          <table:table-cell table:style-name="Tabla55.A2" table:number-columns-spanned="3" office:value-type="string">
            <text:p text:style-name="P15" loext:marker-style-name="T4"><text:span text:style-name="T4">costo de capital propio apalancado</text:span><text:span text:style-name="T4"/></text:p>
          </table:table-cell>
          <table:covered-table-cell/>
          <table:covered-table-cell/>
          <table:table-cell table:style-name="Tabla55.A2" office:value-type="string">
            <text:p text:style-name="P54" loext:marker-style-name="T4"/>
          </table:table-cell>
          <table:table-cell table:style-name="Tabla55.A2" office:value-type="string">
            <text:p text:style-name="P54" loext:marker-style-name="T4"/>
          </table:table-cell>
        </table:table-row>
        <table:table-row table:style-name="Tabla55.1">
          <table:table-cell table:style-name="Tabla55.A2" office:value-type="string">
            <text:p text:style-name="P15" loext:marker-style-name="T4"><text:span text:style-name="T4">D</text:span><text:span text:style-name="T4"/></text:p>
          </table:table-cell>
          <table:table-cell table:style-name="Tabla55.A2" office:value-type="string">
            <text:p text:style-name="P13" loext:marker-style-name="T4"><text:span text:style-name="T4">18000.00</text:span><text:span text:style-name="T4"/></text:p>
          </table:table-cell>
          <table:table-cell table:style-name="Tabla55.A2" table:number-columns-spanned="2" office:value-type="string">
            <text:p text:style-name="P15" loext:marker-style-name="T4"><text:span text:style-name="T4">Monto de la deuda</text:span><text:span text:style-name="T4"/></text:p>
          </table:table-cell>
          <table:covered-table-cell/>
          <table:table-cell table:style-name="Tabla55.A2" office:value-type="string">
            <text:p text:style-name="P54" loext:marker-style-name="T4"/>
          </table:table-cell>
          <table:table-cell table:style-name="Tabla55.A2" office:value-type="string">
            <text:p text:style-name="P54" loext:marker-style-name="T4"/>
          </table:table-cell>
          <table:table-cell table:style-name="Tabla55.A2" office:value-type="string">
            <text:p text:style-name="P54" loext:marker-style-name="T4"/>
          </table:table-cell>
        </table:table-row>
        <table:table-row table:style-name="Tabla55.1">
          <table:table-cell table:style-name="Tabla55.A7" office:value-type="string">
            <text:p text:style-name="P15" loext:marker-style-name="T4"><text:span text:style-name="T4">Io</text:span><text:span text:style-name="T4"/></text:p>
          </table:table-cell>
          <table:table-cell table:style-name="Tabla55.A7" office:value-type="string">
            <text:p text:style-name="P13" loext:marker-style-name="T4"><text:span text:style-name="T4">-6291.32</text:span><text:span text:style-name="T4"/></text:p>
          </table:table-cell>
          <table:table-cell table:style-name="Tabla55.A7" table:number-columns-spanned="2" office:value-type="string">
            <text:p text:style-name="P15" loext:marker-style-name="T4"><text:span text:style-name="T4">Inversión inicial total</text:span><text:span text:style-name="T4"/></text:p>
          </table:table-cell>
          <table:covered-table-cell/>
          <table:table-cell table:style-name="Tabla55.A7" office:value-type="string">
            <text:p text:style-name="P54" loext:marker-style-name="T4"/>
          </table:table-cell>
          <table:table-cell table:style-name="Tabla55.A7" office:value-type="string">
            <text:p text:style-name="P54" loext:marker-style-name="T4"/>
          </table:table-cell>
          <table:table-cell table:style-name="Tabla55.A7" office:value-type="string">
            <text:p text:style-name="P54" loext:marker-style-name="T4"/>
          </table:table-cell>
        </table:table-row>
      </table:table>
      <text:p text:style-name="P109" loext:marker-style-name="T4"><text:span text:style-name="T4">Nota: elaboración propia.</text:span><text:span text:style-name="T4"/></text:p>
      <text:p text:style-name="P113" loext:marker-style-name="T77"/>
      <text:h text:style-name="P87" text:outline-level="3" loext:marker-style-name="T11"><text:bookmark-start text:name="_Toc106699199"/><text:span text:style-name="T4">8.3.1. </text:span><text:span text:style-name="T24">T</text:span><text:span text:style-name="T4">asa Interna de Retorno Financiera (TIRF)</text:span><text:bookmark-end text:name="_Toc106699199"/></text:h>
      <text:p text:style-name="P149" loext:marker-style-name="T10"/>
      <text:p text:style-name="P116" loext:marker-style-name="T10"><text:span text:style-name="T10"><text:s text:c="10"/>La TIRF es una tasa que expresa en términos porcentuales cuando nuestra VANF es igual a 0, esta tasa nos refleja el rendimiento promedio que se obtendrá sobre la inversión. Para calcular esta tasa remplazaremos la Kwacc, deuda e inversión en la siguiente formula </text:span><draw:frame draw:name="Objeto6" text:anchor-type="as-char" svg:width="3.702cm" svg:height="1.191cm" draw:z-index="66"><draw:object xlink:href="./Object 8" xlink:type="simple" xlink:show="embed" xlink:actuate="onLoad"/><draw:image xlink:href="./ObjectReplacements/Object 8" xlink:type="simple" xlink:show="embed" xlink:actuate="onLoad"/></draw:frame><text:span text:style-name="T46">. </text:span><text:span text:style-name="T10"><text:s/>Dado el cálculo nuestro TIRF es de 96.72% <text:s text:c="2"/>Este valor nos indica que nuestro proyecto incrementara el patrimonio o inversión aportada por acciones. </text:span></text:p>
      <text:p text:style-name="P207" loext:marker-style-name="T12"/>
      <text:p text:style-name="TÍTULO_20_Tablas_20_y_20_Figuras" loext:marker-style-name="T51"><text:bookmark-start text:name="_Toc106698926"/><text:span text:style-name="T51">Tabla </text:span><text:bookmark-end text:name="_Toc106698926"/><text:span text:style-name="T51"><text:sequence text:ref-name="refTable27" text:name="Table" text:formula="ooow:Table+1" style:num-format="1">28</text:sequence></text:span><text:span text:style-name="T51"><text:s/></text:span></text:p>
      <text:p text:style-name="TÍTULO_20_Tablas_20_y_20_Figuras">Cálculo de la Tasa Interna de Retorno Financiera.</text:p>
      <table:table table:name="Tabla56" table:style-name="Tabla56">
        <table:table-column table:style-name="Tabla56.A"/>
        <table:table-column table:style-name="Tabla56.B"/>
        <table:table-column table:style-name="Tabla56.C"/>
        <table:table-column table:style-name="Tabla56.D"/>
        <table:table-column table:style-name="Tabla56.E"/>
        <table:table-column table:style-name="Tabla56.F" table:number-columns-repeated="2"/>
        <table:table-row table:style-name="Tabla56.1">
          <table:table-cell table:style-name="Tabla56.A1" table:number-columns-spanned="7" office:value-type="string">
            <text:p text:style-name="P15" loext:marker-style-name="T42"><text:span text:style-name="T42">Tasa interna de retorno financiera (TIRF)</text:span><text:span text:style-name="T42"/></text:p>
          </table:table-cell>
          <table:covered-table-cell/>
          <table:covered-table-cell/>
          <table:covered-table-cell/>
          <table:covered-table-cell/>
          <table:covered-table-cell/>
          <table:covered-table-cell/>
        </table:table-row>
        <table:table-row table:style-name="Tabla56.2">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row>
        <table:table-row table:style-name="Tabla56.1">
          <table:table-cell table:style-name="Tabla56.A2" office:value-type="string">
            <text:p text:style-name="P13" loext:marker-style-name="T42"><text:span text:style-name="T42">TIRF</text:span><text:span text:style-name="T42"/></text:p>
          </table:table-cell>
          <table:table-cell table:style-name="Tabla56.A2" table:number-columns-spanned="2" office:value-type="string">
            <text:p text:style-name="P13" loext:marker-style-name="T42"><text:span text:style-name="T42">96.72%</text:span><text:span text:style-name="T42"/></text:p>
          </table:table-cell>
          <table:covered-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row>
        <text:soft-page-break/>
        <table:table-row table:style-name="Tabla56.1">
          <table:table-cell table:style-name="Tabla56.A2" office:value-type="string">
            <text:p text:style-name="P13" loext:marker-style-name="T42"><text:span text:style-name="T42">VANF</text:span><text:span text:style-name="T42"/></text:p>
          </table:table-cell>
          <table:table-cell table:style-name="Tabla56.A2" office:value-type="string">
            <text:p text:style-name="P13" loext:marker-style-name="T42"><text:span text:style-name="T42">0</text:span><text:span text:style-name="T42"/></text:p>
          </table:table-cell>
          <table:table-cell table:style-name="Tabla56.A2" office:value-type="string">
            <text:p text:style-name="P13" loext:marker-style-name="T42"><text:span text:style-name="T42"> </text:span><text:span text:style-name="T42"/></text:p>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row>
        <table:table-row table:style-name="Tabla56.1">
          <table:table-cell table:style-name="Tabla56.A2" office:value-type="string">
            <text:p text:style-name="P13" loext:marker-style-name="T42"><text:span text:style-name="T42">FCFt</text:span><text:span text:style-name="T42"/></text:p>
          </table:table-cell>
          <table:table-cell table:style-name="Tabla56.A2" office:value-type="string">
            <text:p text:style-name="P13" loext:marker-style-name="T42"><text:span text:style-name="T42">99790.18</text:span><text:span text:style-name="T42"/></text:p>
          </table:table-cell>
          <table:table-cell table:style-name="Tabla56.A2" table:number-columns-spanned="3" office:value-type="string">
            <text:p text:style-name="P13" loext:marker-style-name="T42"><text:span text:style-name="T42">Flujo de caja financiero del periodo</text:span><text:span text:style-name="T42"/></text:p>
          </table:table-cell>
          <table:covered-table-cell/>
          <table:covered-table-cell/>
          <table:table-cell table:style-name="Tabla56.A2" office:value-type="string">
            <text:p text:style-name="P38" loext:marker-style-name="T42"/>
          </table:table-cell>
          <table:table-cell table:style-name="Tabla56.A2" office:value-type="string">
            <text:p text:style-name="P38" loext:marker-style-name="T42"/>
          </table:table-cell>
        </table:table-row>
        <table:table-row table:style-name="Tabla56.1">
          <table:table-cell table:style-name="Tabla56.A2" office:value-type="string">
            <text:p text:style-name="P13" loext:marker-style-name="T42"><text:span text:style-name="T42">Kwacc</text:span><text:span text:style-name="T42"/></text:p>
          </table:table-cell>
          <table:table-cell table:style-name="Tabla56.A2" office:value-type="string">
            <text:p text:style-name="P13" loext:marker-style-name="T42"><text:span text:style-name="T42">21.53%</text:span><text:span text:style-name="T42"/></text:p>
          </table:table-cell>
          <table:table-cell table:style-name="Tabla56.A2" table:number-columns-spanned="3" office:value-type="string">
            <text:p text:style-name="P13" loext:marker-style-name="T42"><text:span text:style-name="T42">costo de capital propio apalancado</text:span><text:span text:style-name="T42"/></text:p>
          </table:table-cell>
          <table:covered-table-cell/>
          <table:covered-table-cell/>
          <table:table-cell table:style-name="Tabla56.A2" office:value-type="string">
            <text:p text:style-name="P38" loext:marker-style-name="T42"/>
          </table:table-cell>
          <table:table-cell table:style-name="Tabla56.A2" office:value-type="string">
            <text:p text:style-name="P38" loext:marker-style-name="T42"/>
          </table:table-cell>
        </table:table-row>
        <table:table-row table:style-name="Tabla56.1">
          <table:table-cell table:style-name="Tabla56.A2" office:value-type="string">
            <text:p text:style-name="P13" loext:marker-style-name="T42"><text:span text:style-name="T42">D</text:span><text:span text:style-name="T42"/></text:p>
          </table:table-cell>
          <table:table-cell table:style-name="Tabla56.A2" office:value-type="string">
            <text:p text:style-name="P13" loext:marker-style-name="T42"><text:span text:style-name="T42">18000.00</text:span><text:span text:style-name="T42"/></text:p>
          </table:table-cell>
          <table:table-cell table:style-name="Tabla56.A2" table:number-columns-spanned="2" office:value-type="string">
            <text:p text:style-name="P13" loext:marker-style-name="T42"><text:span text:style-name="T42">Monto de la deuda</text:span><text:span text:style-name="T42"/></text:p>
          </table:table-cell>
          <table:covered-table-cell/>
          <table:table-cell table:style-name="Tabla56.A2" office:value-type="string">
            <text:p text:style-name="P38" loext:marker-style-name="T42"/>
          </table:table-cell>
          <table:table-cell table:style-name="Tabla56.A2" office:value-type="string">
            <text:p text:style-name="P38" loext:marker-style-name="T42"/>
          </table:table-cell>
          <table:table-cell table:style-name="Tabla56.A2" office:value-type="string">
            <text:p text:style-name="P38" loext:marker-style-name="T42"/>
          </table:table-cell>
        </table:table-row>
        <table:table-row table:style-name="Tabla56.1">
          <table:table-cell table:style-name="Tabla56.A8" office:value-type="string">
            <text:p text:style-name="P13" loext:marker-style-name="T42"><text:span text:style-name="T42">Io</text:span><text:span text:style-name="T42"/></text:p>
          </table:table-cell>
          <table:table-cell table:style-name="Tabla56.A8" office:value-type="string">
            <text:p text:style-name="P13" loext:marker-style-name="T42"><text:span text:style-name="T42">-6291.32</text:span><text:span text:style-name="T42"/></text:p>
          </table:table-cell>
          <table:table-cell table:style-name="Tabla56.A8" table:number-columns-spanned="2" office:value-type="string">
            <text:p text:style-name="P13" loext:marker-style-name="T42"><text:span text:style-name="T42">Inversión inicial total</text:span><text:span text:style-name="T42"/></text:p>
          </table:table-cell>
          <table:covered-table-cell/>
          <table:table-cell table:style-name="Tabla56.A8" office:value-type="string">
            <text:p text:style-name="P38" loext:marker-style-name="T42"/>
          </table:table-cell>
          <table:table-cell table:style-name="Tabla56.A8" office:value-type="string">
            <text:p text:style-name="P38" loext:marker-style-name="T42"/>
          </table:table-cell>
          <table:table-cell table:style-name="Tabla56.A8" office:value-type="string">
            <text:p text:style-name="P38" loext:marker-style-name="T42"/>
          </table:table-cell>
        </table:table-row>
      </table:table>
      <text:p text:style-name="P109" loext:marker-style-name="T4"><text:span text:style-name="T4">Nota: elaboración propia.</text:span><text:span text:style-name="T4"/></text:p>
      <text:p text:style-name="P149" loext:marker-style-name="T10"/>
      <text:h text:style-name="P68" text:outline-level="1" loext:marker-style-name="T4"><text:bookmark-start text:name="_Toc106699200"/><text:span text:style-name="T4">CONCLUSIONES</text:span><text:bookmark-end text:name="_Toc106699200"/><text:span text:style-name="T4"/></text:h>
      <text:list text:style-name="WWNum19">
        <text:list-item>
          <text:p text:style-name="P107" loext:marker-style-name="T4"><text:span text:style-name="T4">En conclusión, los estudios realizados de manera rigurosa del análisis y de la evaluación del proyecto de inversión, con el objetivo de comprobar la viabilidad y factibilidad del proyecto de estampados de polos personalizados, podemos afirmar que existe una demanda insatisfecha del rubro en el que se quiere ingresar y en vista de la falta de ofertantes y como consecuencia encontrándose en un mercado tipo competitivo. La propuesta de valor de nuestro proyecto que se enfoca en los diseños personalizados en base a los gustos y preferencias del consumidor, nuestro producto contiene diseños únicos e innovadores. Como también el proyecto está constituido como una microempresa con un régimen especial tributario y dado un horizonte de evaluación de 5 años y en base a la inversión y al valor de recupero se pudo observar que el proyecto cuenta con una inversión inicial de 94291.32 soles, con un capital propio de 5719.90 soles y con un financiamiento de tercero de 18000 soles y un valor de recupero de 3896.12 soles.</text:span><text:span text:style-name="T4"/></text:p>
        </text:list-item>
        <text:list-item>
          <text:p text:style-name="P107" loext:marker-style-name="T4"><text:soft-page-break/><text:span text:style-name="T4">El precio de venta de nuestro producto es de 53.00 soles siendo accesible en términos de calidad e innovación, nuestros estados financiaron reflejaron una estabilidad financiera en el periodo de 5 años como también se mostró que el proyecto genera flujos de efectivos positivos.</text:span><text:span text:style-name="T4"/></text:p>
        </text:list-item>
        <text:list-item>
          <text:p text:style-name="P107" loext:marker-style-name="T22"><text:span text:style-name="T4">Como punto final se pudo observar los índices de rentabilidad en base al valor</text:span><text:span text:style-name="T22"> </text:span><text:span text:style-name="T4">actual neto económico que nos muestra el costo de oportunidad de invertir en el proyecto o destinarlo a otro recurso.</text:span></text:p>
        </text:list-item>
        <text:list-item>
          <text:p text:style-name="P107" loext:marker-style-name="T22"><text:span text:style-name="T4">En relación con el VANE el valor del proyecto es de 35973.95 soles dando lugar la</text:span><text:span text:style-name="T22"> </text:span><text:span text:style-name="T4">afirmación de una rentabilidad ya que el valor es positivo. </text:span><text:span text:style-name="T22"><text:s/></text:span><text:span text:style-name="T4">La tasa interés de retorno en términos porcentuales indicador que nuestro proyecto</text:span><text:span text:style-name="T22"> </text:span><text:span text:style-name="T4">en términos porcentuales es rentable. Nuestra tasa de interés de retorno (TIRE) es de <text:s text:c="2"/>57.79% Este valor nos indica que Nuestro rendimiento esperado será mayor que el rendimiento mínimo esperado.</text:span></text:p>
        </text:list-item>
      </text:list>
      <text:p text:style-name="P149" loext:marker-style-name="T10"/>
      <text:p text:style-name="P149" loext:marker-style-name="T10"/>
      <text:p text:style-name="P150"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BoldMT" svg:font-family="Arial-BoldMT" style:font-family-generic="system" style:font-pitch="variable"/>
    <style:font-face style:name="Arial-ItalicMT" svg:font-family="Arial-ItalicMT" style:font-family-generic="system" style:font-pitch="variable"/>
    <style:font-face style:name="Arial1" svg:font-family="Arial" style:font-family-generic="system" style:font-pitch="variable"/>
    <style:font-face style:name="ArialMT" svg:font-family="ArialMT"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arlito" svg:font-family="Carlito" style:font-family-generic="roman"/>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egoe UI" svg:font-family="'Segoe UI'" style:font-family-generic="roman"/>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Times New Roman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text-indent="1.27cm" style:auto-text-indent="false" style:writing-mode="lr-tb"/>
      <style:text-properties fo:color="#000000" loext:opacity="100%" style:font-name="Times New Roman" fo:font-family="'Times New Roman'" style:font-family-generic="roman" fo:font-size="12pt" fo:language="es" fo:country="PE" style:font-size-asian="12pt" style:language-asian="es" style:country-asian="MX"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text-align="center" style:justify-single-word="false" fo:keep-together="always" fo:text-indent="0cm" style:auto-text-indent="false" fo:keep-with-next="always"/>
      <style:text-properties fo:font-weight="bold" style:font-name-asian="游ゴシック Light" style:font-family-asian="'游ゴシック Light'" style:font-family-generic-asian="system" style:font-pitch-asian="variable"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auto-update="true" style:default-outline-level="2" style:list-style-name="WWNum17" style:list-level="2" style:class="text">
      <style:paragraph-properties fo:text-align="start" style:justify-single-word="false" fo:keep-together="always" fo:keep-with-next="always"/>
      <style:text-properties style:use-window-font-color="true" loext:opacity="0%" fo:font-weight="bold" style:font-name-asian="游ゴシック Light" style:font-family-asian="'游ゴシック Light'" style:font-family-generic-asian="system" style:font-pitch-asian="variable"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auto-update="true" style:default-outline-level="3" style:list-style-name="WWNum17" style:list-level="3" style:class="text">
      <style:paragraph-properties fo:margin-left="2.54cm" fo:text-align="start" style:justify-single-word="false" fo:keep-together="always" fo:keep-with-next="always">
        <style:tab-stops>
          <style:tab-stop style:position="0cm"/>
        </style:tab-stops>
      </style:paragraph-properties>
      <style:text-properties style:use-window-font-color="true" loext:opacity="0%" fo:font-style="italic" fo:font-weight="bold" style:font-name-asian="游ゴシック Light" style:font-family-asian="'游ゴシック Light'"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Título_20_4_20_Car" style:auto-update="true" style:default-outline-level="4" style:list-style-name="WWNum17" style:list-level="4" style:class="text">
      <style:paragraph-properties fo:margin-left="1.905cm" fo:text-align="start" style:justify-single-word="false" fo:keep-together="always" fo:text-indent="0cm" style:auto-text-indent="false" fo:keep-with-next="always"/>
      <style:text-properties style:use-window-font-color="true" loext:opacity="0%" fo:font-weight="bold" style:font-name-asian="游ゴシック Light" style:font-family-asian="'游ゴシック Light'" style:font-family-generic-asian="system" style:font-pitch-asian="variable"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auto-update="true" style:default-outline-level="5" style:class="text">
      <style:paragraph-properties fo:margin-left="0cm" fo:keep-together="always" fo:text-indent="1.27cm" style:auto-text-indent="false" fo:keep-with-next="always"/>
      <style:text-properties fo:font-style="italic" fo:font-weight="bold" style:font-name-asian="游ゴシック Light" style:font-family-asian="'游ゴシック Light'"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APA_20_Párrafo" style:display-name="APA Párrafo" style:family="paragraph" style:parent-style-name="Heading_20_1" loext:linked-style-name="APA_20_Párrafo_20_Car" style:list-style-name="WWNum2">
      <style:text-properties fo:language="es" fo:country="ES"/>
    </style:style>
    <style:style style:name="NOTAS_20_APA_20_Séptima_20_Edición" style:display-name="NOTAS APA Séptima Edición" style:family="paragraph" style:parent-style-name="Standard" loext:linked-style-name="NOTAS_20_APA_20_Séptima_20_Edición_20_Car" style:auto-update="true">
      <style:paragraph-properties fo:margin-left="1.27cm"/>
      <style:text-properties fo:font-size="10pt" fo:font-weight="bold" style:font-size-asian="10pt" style:font-weight-asian="bold" style:font-weight-complex="bold"/>
    </style:style>
    <style:style style:name="TÍTULO_20_Tablas_20_y_20_Figuras" style:display-name="TÍTULO Tablas y Figuras" style:family="paragraph" style:parent-style-name="Caption" loext:linked-style-name="TÍTULO_20_Tablas_20_y_20_Figuras_20_Car" style:auto-update="true">
      <style:paragraph-properties fo:margin-left="1.27cm" fo:margin-top="0.212cm" fo:margin-bottom="0cm" style:contextual-spacing="false"/>
      <style:text-properties style:use-window-font-color="true" loext:opacity="0%" fo:font-size="12pt" style:font-size-asian="12pt" style:font-style-complex="normal"/>
    </style:style>
    <style:style style:name="msonormal" style:family="paragraph" style:parent-style-name="Standard">
      <style:paragraph-properties fo:margin-top="0.494cm" fo:margin-bottom="0.494cm" style:contextual-spacing="false"/>
      <style:text-properties fo:language="en" fo:country="US"/>
    </style:style>
    <style:style style:name="Normal_20__28_Web_29_" style:display-name="Normal (Web)" style:family="paragraph" style:parent-style-name="Standard">
      <style:paragraph-properties fo:margin-top="0.494cm" fo:margin-bottom="0.494cm" style:contextual-spacing="false"/>
      <style:text-properties fo:language="en" fo:country="U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fo:font-size="16pt" fo:language="en" fo:country="US" fo:font-style="italic" fo:font-weight="normal" style:font-size-asian="16pt" style:font-style-asian="italic" style:font-weight-asian="normal" style:font-style-complex="italic"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Marginalia" style:family="paragraph" style:parent-style-name="Standard" loext:linked-style-name="Texto_20_comentario_20_Car" style:class="text">
      <style:text-properties fo:font-size="10pt" style:font-size-asian="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fo:font-size="12pt" fo:language="es" fo:country="ES" style:font-size-asian="12pt" style:language-asian="es" style:country-asian="ES" style:font-name-complex="Times New Roman1" style:font-family-complex="'Times New Roman'" style:font-family-generic-complex="system" style:font-pitch-complex="variable" style:font-size-complex="10pt"/>
    </style:style>
    <style:style style:name="Endnote" style:family="paragraph" style:parent-style-name="Standard" loext:linked-style-name="Texto_20_nota_20_al_20_final_20_Car" style:class="extra">
      <style:text-properties fo:font-size="10pt" style:font-size-asian="10pt"/>
    </style:style>
    <style:style style:name="Footnote" style:family="paragraph" style:parent-style-name="Standard" loext:linked-style-name="Texto_20_nota_20_pie_20_Car" style:class="extra">
      <style:text-properties fo:font-size="10pt" style:font-size-asian="10pt"/>
    </style:style>
    <style:style style:name="Notas_20_APA" style:display-name="Notas APA" style:family="paragraph" style:parent-style-name="Standard" loext:linked-style-name="Notas_20_APA_20_Car">
      <style:paragraph-properties fo:margin-left="1.27cm"/>
      <style:text-properties fo:font-size="10pt" style:font-size-asian="10pt"/>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fo:font-size="28pt" fo:letter-spacing="-0.018cm"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Figure_20_Index_20_1" style:display-name="Figure Index 1" style:family="paragraph" style:parent-style-name="Standard" style:next-style-name="Standard" style:class="index">
      <style:paragraph-properties fo:margin-left="0.847cm" fo:text-indent="-0.847cm" style:auto-text-indent="false"/>
      <style:text-properties style:font-name="Calibri" fo:font-family="Calibri" style:font-family-generic="roman"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Título_20_11" style:display-name="Título 11" style:family="paragraph" style:parent-style-name="Standard" style:list-style-name="WWNum12">
      <style:text-properties style:font-name="Carlito" fo:font-family="Carlito" style:font-family-generic="roman" style:font-name-asian="Carlito1" style:font-family-asian="Carlito" style:font-family-generic-asian="system" style:font-pitch-asian="variable"/>
    </style:style>
    <style:style style:name="Título_20_21" style:display-name="Título 21" style:family="paragraph" style:parent-style-name="Standard" style:list-style-name="WWNum12" style:list-level="2">
      <style:text-properties style:font-name="Carlito" fo:font-family="Carlito" style:font-family-generic="roman" style:font-name-asian="Carlito1" style:font-family-asian="Carlito" style:font-family-generic-asian="system" style:font-pitch-asian="variable"/>
    </style:style>
    <style:style style:name="Título_20_31" style:display-name="Título 31" style:family="paragraph" style:parent-style-name="Standard" style:list-style-name="WWNum12" style:list-level="3">
      <style:text-properties style:font-name="Carlito" fo:font-family="Carlito" style:font-family-generic="roman" style:font-name-asian="Carlito1" style:font-family-asian="Carlito" style:font-family-generic-asian="system" style:font-pitch-asian="variable"/>
    </style:style>
    <style:style style:name="Título_20_41" style:display-name="Título 41" style:family="paragraph" style:parent-style-name="Standard" style:list-style-name="WWNum12" style:list-level="4">
      <style:text-properties style:font-name="Carlito" fo:font-family="Carlito" style:font-family-generic="roman" style:font-name-asian="Carlito1" style:font-family-asian="Carlito" style:font-family-generic-asian="system" style:font-pitch-asian="variable"/>
    </style:style>
    <style:style style:name="Título_20_51" style:display-name="Título 51" style:family="paragraph" style:parent-style-name="Standard" style:list-style-name="WWNum12" style:list-level="5">
      <style:text-properties style:font-name="Carlito" fo:font-family="Carlito" style:font-family-generic="roman" style:font-name-asian="Carlito1" style:font-family-asian="Carlito" style:font-family-generic-asian="system" style:font-pitch-asian="variable"/>
    </style:style>
    <style:style style:name="Título_20_61" style:display-name="Título 61" style:family="paragraph" style:parent-style-name="Standard" style:list-style-name="WWNum12" style:list-level="6">
      <style:text-properties style:font-name="Carlito" fo:font-family="Carlito" style:font-family-generic="roman" style:font-name-asian="Carlito1" style:font-family-asian="Carlito" style:font-family-generic-asian="system" style:font-pitch-asian="variable"/>
    </style:style>
    <style:style style:name="Título_20_71" style:display-name="Título 71" style:family="paragraph" style:parent-style-name="Standard" style:list-style-name="WWNum12" style:list-level="7">
      <style:text-properties style:font-name="Carlito" fo:font-family="Carlito" style:font-family-generic="roman" style:font-name-asian="Carlito1" style:font-family-asian="Carlito" style:font-family-generic-asian="system" style:font-pitch-asian="variable"/>
    </style:style>
    <style:style style:name="Título_20_81" style:display-name="Título 81" style:family="paragraph" style:parent-style-name="Standard" style:list-style-name="WWNum12" style:list-level="8">
      <style:text-properties style:font-name="Carlito" fo:font-family="Carlito" style:font-family-generic="roman" style:font-name-asian="Carlito1" style:font-family-asian="Carlito" style:font-family-generic-asian="system" style:font-pitch-asian="variable"/>
    </style:style>
    <style:style style:name="Título_20_91" style:display-name="Título 91" style:family="paragraph" style:parent-style-name="Standard" style:list-style-name="WWNum12" style:list-level="9">
      <style:text-properties style:font-name="Carlito" fo:font-family="Carlito" style:font-family-generic="roman" style:font-name-asian="Carlito1" style:font-family-asian="Carlito" style:font-family-generic-asian="system" style:font-pitch-asian="variable"/>
    </style:style>
    <style:style style:name="Contents_20_4" style:display-name="Contents 4" style:family="paragraph" style:parent-style-name="Standard" style:next-style-name="Standard" style:auto-update="true" style:class="index">
      <style:paragraph-properties fo:margin-left="1.164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auto-update="true" style:class="index">
      <style:paragraph-properties fo:margin-left="1.552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auto-update="true" style:class="index">
      <style:paragraph-properties fo:margin-left="1.94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auto-update="true" style:class="index">
      <style:paragraph-properties fo:margin-left="2.328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auto-update="true" style:class="index">
      <style:paragraph-properties fo:margin-left="2.716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auto-update="true" style:class="index">
      <style:paragraph-properties fo:margin-left="3.104cm" fo:margin-top="0cm" fo:margin-bottom="0.176cm" style:contextual-spacing="false" fo:line-height="108%" fo:text-indent="0cm" style:auto-text-indent="false"/>
      <style:text-properties style:font-name="Calibri" fo:font-family="Calibri" style:font-family-generic="roman" fo:font-size="11pt" fo:language="es" fo:country="MX"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fo:color="#000000" loext:opacity="100%" style:font-name="Times New Roman" fo:font-family="'Times New Roman'" style:font-family-generic="roman" fo:font-size="12pt" fo:language="es" fo:country="ES" fo:font-weight="bold" style:font-name-asian="游ゴシック Light" style:font-family-asian="'游ゴシック Light'" style:font-family-generic-asian="system" style:font-pitch-asian="variable" style:font-size-asian="12pt" style:language-asian="es" style:country-asian="MX" style:font-weight-asian="bold" style:font-name-complex="Times New Roman1" style:font-family-complex="'Times New Roman'" style:font-family-generic-complex="system" style:font-pitch-complex="variable" style:font-size-complex="16pt"/>
    </style:style>
    <style:style style:name="NOTAS_20_APA_20_Séptima_20_Edición_20_Car" style:display-name="NOTAS APA Séptima Edición Car" style:family="text" style:parent-style-name="Default_20_Paragraph_20_Font" loext:linked-style-name="NOTAS_20_APA_20_Séptima_20_Edición">
      <style:text-properties style:font-name="Times New Roman" fo:font-family="'Times New Roman'" style:font-family-generic="roman" fo:font-size="10pt" fo:language="es" fo:country="ES" fo:font-weight="bold"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TÍTULO_20_Tablas_20_y_20_Figuras_20_Car" style:display-name="TÍTULO Tablas y Figuras Car" style:family="text" style:parent-style-name="Default_20_Paragraph_20_Font" loext:linked-style-name="TÍTULO_20_Tablas_20_y_20_Figuras">
      <style:text-properties style:font-name="Times New Roman" fo:font-family="'Times New Roman'" style:font-family-generic="roman" fo:font-size="12pt" fo:language="es" fo:country="ES" fo:font-style="italic" style:font-name-asian="Calibri1" style:font-family-asian="Calibri" style:font-family-generic-asian="system" style:font-pitch-asian="variable" style:font-size-asian="12pt" style:font-style-asian="italic" style:font-size-complex="9pt"/>
    </style:style>
    <style:style style:name="Título_20_1_20_Car" style:display-name="Título 1 Car" style:family="text" style:parent-style-name="Default_20_Paragraph_20_Font">
      <style:text-properties fo:color="#000000" loext:opacity="100%" style:font-name="Times New Roman" fo:font-family="'Times New Roman'" style:font-family-generic="roman" fo:font-size="12pt" fo:language="es" fo:country="PE" fo:font-weight="bold" style:font-name-asian="游ゴシック Light" style:font-family-asian="'游ゴシック Light'" style:font-family-generic-asian="system" style:font-pitch-asian="variable" style:font-size-asian="12pt" style:language-asian="es" style:country-asian="MX" style:font-weight-asian="bold"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style:text-properties style:font-name="Times New Roman" fo:font-family="'Times New Roman'" style:font-family-generic="roman" fo:font-size="12pt" fo:language="es" fo:country="PE" fo:font-weight="bold" style:font-name-asian="游ゴシック Light" style:font-family-asian="'游ゴシック Light'" style:font-family-generic-asian="system" style:font-pitch-asian="variable" style:font-size-asian="12pt" style:language-asian="es" style:country-asian="MX" style:font-weight-asian="bold" style:font-name-complex="Times New Roman1" style:font-family-complex="'Times New Roman'" style:font-family-generic-complex="system" style:font-pitch-complex="variable" style:font-size-complex="13pt"/>
    </style:style>
    <style:style style:name="Título_20_3_20_Car" style:display-name="Título 3 Car" style:family="text" style:parent-style-name="Default_20_Paragraph_20_Font">
      <style:text-properties style:font-name="Times New Roman" fo:font-family="'Times New Roman'" style:font-family-generic="roman" fo:font-size="12pt" fo:language="es" fo:country="PE" fo:font-style="italic" fo:font-weight="bold" style:font-name-asian="游ゴシック Light" style:font-family-asian="'游ゴシック Light'" style:font-family-generic-asian="system" style:font-pitch-asian="variable" style:font-size-asian="12pt" style:language-asian="es" style:country-asian="MX" style:font-style-asian="italic" style:font-weight-asian="bold" style:font-name-complex="Times New Roman1" style:font-family-complex="'Times New Roman'" style:font-family-generic-complex="system" style:font-pitch-complex="variable" style:font-size-complex="12pt"/>
    </style:style>
    <style:style style:name="Título_20_4_20_Car" style:display-name="Título 4 Car" style:family="text" style:parent-style-name="Default_20_Paragraph_20_Font">
      <style:text-properties style:font-name="Times New Roman" fo:font-family="'Times New Roman'" style:font-family-generic="roman" fo:font-size="12pt" fo:language="es" fo:country="PE" fo:font-weight="bold" style:font-name-asian="游ゴシック Light" style:font-family-asian="'游ゴシック Light'" style:font-family-generic-asian="system" style:font-pitch-asian="variable" style:font-size-asian="12pt" style:language-asian="es" style:country-asian="MX" style:font-weight-asian="bold" style:font-name-complex="Times New Roman1" style:font-family-complex="'Times New Roman'" style:font-family-generic-complex="system" style:font-pitch-complex="variable" style:font-size-complex="12pt" style:font-style-complex="italic"/>
    </style:style>
    <style:style style:name="Título_20_5_20_Car" style:display-name="Título 5 Car" style:family="text" style:parent-style-name="Default_20_Paragraph_20_Font">
      <style:text-properties fo:color="#000000" loext:opacity="100%" style:font-name="Times New Roman" fo:font-family="'Times New Roman'" style:font-family-generic="roman" fo:font-size="12pt" fo:language="es" fo:country="PE" fo:font-style="italic" fo:font-weight="bold" style:font-name-asian="游ゴシック Light" style:font-family-asian="'游ゴシック Light'" style:font-family-generic-asian="system" style:font-pitch-asian="variable" style:font-size-asian="12pt" style:language-asian="es" style:country-asian="MX" style:font-style-asian="italic"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pple-tab-span" style:family="text" style:parent-style-name="Default_20_Paragraph_20_Font"/>
    <style:style style:name="Encabezado_20_Car" style:display-name="Encabezado Car" style:family="text" style:parent-style-name="Default_20_Paragraph_20_Font">
      <style:text-properties style:font-name="Times New Roman" fo:font-family="'Times New Roman'" style:font-family-generic="roman" fo:font-size="12pt" fo:language="es" fo:country="ES" style:font-size-asian="12pt" style:language-asian="es" style:country-asian="ES"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fo:font-size="12pt" fo:language="es" fo:country="ES" style:font-size-asian="12pt" style:language-asian="es" style:country-asian="ES"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fo:font-size="10pt" fo:language="es" fo:country="ES" style:font-size-asian="10pt" style:language-asian="es" style:country-asian="E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loext:linked-style-name="annotation_20_subject">
      <style:text-properties style:font-name="Times New Roman" fo:font-family="'Times New Roman'" style:font-family-generic="roman" fo:font-size="10pt" fo:language="es" fo:country="ES" fo:font-weight="bold"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Texto_20_nota_20_pie_20_Car" style:display-name="Texto nota pie Car" style:family="text" style:parent-style-name="Default_20_Paragraph_20_Font">
      <style:text-properties fo:font-size="10pt" style:font-size-asian="10pt" style:font-size-complex="10pt"/>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fo:language="es" fo:country="ES" style:font-name-asian="Calibri1" style:font-family-asian="Calibri" style:font-family-generic-asian="system" style:font-pitch-asian="variable" style:font-size-asian="10pt"/>
    </style:style>
    <style:style style:name="Título_20_Car" style:display-name="Título Car" style:family="text" style:parent-style-name="Default_20_Paragraph_20_Font">
      <style:text-properties style:font-name="Calibri Light" fo:font-family="'Calibri Light'" style:font-family-generic="roman" fo:font-size="28pt" fo:letter-spacing="-0.018cm" fo:language="es" fo:country="ES"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fo:font-size="9pt" fo:language="es" fo:country="PE"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ffffff" loext:opacity="100%">
        <loext:char-complex-color loext:theme-type="light1" loext:color-type="theme"/>
      </style:text-propertie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fo:color="#ffffff" loext:opacity="1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loext:char-complex-color loext:theme-type="light1" loext:color-type="theme"/>
      </style:text-properties>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ize-complex="12pt" style:font-style-complex="normal" style:font-weight-complex="bold" style:text-emphasize="none" style:font-relief="none" text:display="true"/>
    </style:style>
    <style:style style:name="ListLabel_20_12" style:display-name="ListLabel 12" style:family="text">
      <style:text-properties fo:font-size="12pt" style:font-size-asian="12pt" style:font-size-complex="12pt"/>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0" style:display-name="ListLabel 9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8" style:display-name="ListLabel 1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1" style:display-name="ListLabel 1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4" style:display-name="ListLabel 1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7" style:display-name="ListLabel 1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8" style:display-name="ListLabel 1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1" style:display-name="ListLabel 1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4" style:display-name="ListLabel 1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3" style:display-name="ListLabel 1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4" style:display-name="ListLabel 17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5" style:display-name="ListLabel 17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6" style:display-name="ListLabel 1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7" style:display-name="ListLabel 17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8" style:display-name="ListLabel 1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9" style:display-name="ListLabel 1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0" style:display-name="ListLabel 18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1" style:display-name="ListLabel 18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2" style:display-name="ListLabel 1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3" style:display-name="ListLabel 1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4" style:display-name="ListLabel 1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5" style:display-name="ListLabel 1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6" style:display-name="ListLabel 1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7" style:display-name="ListLabel 1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8" style:display-name="ListLabel 1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9" style:display-name="ListLabel 1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0" style:display-name="ListLabel 19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1" style:display-name="ListLabel 1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2" style:display-name="ListLabel 19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3" style:display-name="ListLabel 1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4" style:display-name="ListLabel 1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5" style:display-name="ListLabel 19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6" style:display-name="ListLabel 1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7" style:display-name="ListLabel 1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8" style:display-name="ListLabel 19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9" style:display-name="ListLabel 1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0" style:display-name="ListLabel 2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1" style:display-name="ListLabel 20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2" style:display-name="ListLabel 2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3" style:display-name="ListLabel 2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4" style:display-name="ListLabel 20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5" style:display-name="ListLabel 2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6" style:display-name="ListLabel 2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7" style:display-name="ListLabel 20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variant="normal" fo:text-transform="none" fo:color="#ffffff" loext:opacity="1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loext:char-complex-color loext:theme-type="light1" loext:color-type="theme"/>
      </style:text-properties>
    </style:style>
    <style:style style:name="ListLabel_20_218" style:display-name="ListLabel 21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ize-complex="12pt" style:font-style-complex="normal" style:font-weight-complex="bold" style:text-emphasize="none" style:font-relief="none" text:display="true"/>
    </style:style>
    <style:style style:name="ListLabel_20_219" style:display-name="ListLabel 219" style:family="text">
      <style:text-properties fo:font-size="12pt" style:font-size-asian="12pt" style:font-size-complex="12pt"/>
    </style:style>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11" style:family="table">
      <style:table-properties style:width="14.975cm" fo:margin-left="0cm" fo:margin-top="0cm" fo:margin-bottom="0cm" table:align="left" style:writing-mode="page"/>
    </style:style>
    <style:style style:name="Tabla11.A" style:family="table-column">
      <style:table-column-properties style:column-width="4.992cm"/>
    </style:style>
    <style:style style:name="Tabla11.1" style:family="table-row">
      <style:table-row-properties fo:keep-together="auto"/>
    </style:style>
    <style:style style:name="Tabla11.A1" style:family="table-cell">
      <style:table-cell-properties fo:padding-left="0.191cm" fo:padding-right="0.191cm" fo:padding-top="0cm" fo:padding-bottom="0cm" fo:border="none"/>
    </style:style>
    <style:style style:name="Tabla14" style:family="table">
      <style:table-properties style:width="14.975cm" fo:margin-left="0cm" fo:margin-top="0cm" fo:margin-bottom="0cm" table:align="left" style:writing-mode="page"/>
    </style:style>
    <style:style style:name="Tabla14.A" style:family="table-column">
      <style:table-column-properties style:column-width="4.992cm"/>
    </style:style>
    <style:style style:name="Tabla14.1" style:family="table-row">
      <style:table-row-properties fo:keep-together="auto"/>
    </style:style>
    <style:style style:name="Tabla14.A1" style:family="table-cell">
      <style:table-cell-properties fo:padding-left="0.191cm" fo:padding-right="0.191cm" fo:padding-top="0cm" fo:padding-bottom="0cm" fo:border="none"/>
    </style:style>
    <style:style style:name="Tabla13" style:family="table">
      <style:table-properties style:width="14.975cm" fo:margin-left="0cm" fo:margin-top="0cm" fo:margin-bottom="0cm" table:align="left" style:writing-mode="page"/>
    </style:style>
    <style:style style:name="Tabla13.A" style:family="table-column">
      <style:table-column-properties style:column-width="4.992cm"/>
    </style:style>
    <style:style style:name="Tabla13.1" style:family="table-row">
      <style:table-row-properties fo:keep-together="auto"/>
    </style:style>
    <style:style style:name="Tabla13.A1" style:family="table-cell">
      <style:table-cell-properties fo:padding-left="0.191cm" fo:padding-right="0.191cm" fo:padding-top="0cm" fo:padding-bottom="0cm" fo:border="none"/>
    </style:style>
    <style:style style:name="Tabla15" style:family="table">
      <style:table-properties style:width="14.975cm" fo:margin-left="0cm" fo:margin-top="0cm" fo:margin-bottom="0cm" table:align="left" style:writing-mode="page"/>
    </style:style>
    <style:style style:name="Tabla15.A" style:family="table-column">
      <style:table-column-properties style:column-width="4.992cm"/>
    </style:style>
    <style:style style:name="Tabla15.1" style:family="table-row">
      <style:table-row-properties fo:keep-together="auto"/>
    </style:style>
    <style:style style:name="Tabla15.A1" style:family="table-cell">
      <style:table-cell-properties fo:padding-left="0.191cm" fo:padding-right="0.191cm" fo:padding-top="0cm" fo:padding-bottom="0cm" fo:border="none"/>
    </style:style>
    <style:style style:name="Tabla18" style:family="table">
      <style:table-properties style:width="24.712cm" fo:margin-left="0cm" fo:margin-top="0cm" fo:margin-bottom="0cm" table:align="left" style:writing-mode="page"/>
    </style:style>
    <style:style style:name="Tabla18.A" style:family="table-column">
      <style:table-column-properties style:column-width="8.237cm"/>
    </style:style>
    <style:style style:name="Tabla18.1" style:family="table-row">
      <style:table-row-properties fo:keep-together="auto"/>
    </style:style>
    <style:style style:name="Tabla18.A1" style:family="table-cell">
      <style:table-cell-properties fo:padding-left="0.191cm" fo:padding-right="0.191cm" fo:padding-top="0cm" fo:padding-bottom="0cm" fo:border="none"/>
    </style:style>
    <style:style style:name="Tabla20" style:family="table">
      <style:table-properties style:width="24.712cm" fo:margin-left="0cm" fo:margin-top="0cm" fo:margin-bottom="0cm" table:align="left" style:writing-mode="page"/>
    </style:style>
    <style:style style:name="Tabla20.A" style:family="table-column">
      <style:table-column-properties style:column-width="8.237cm"/>
    </style:style>
    <style:style style:name="Tabla20.1" style:family="table-row">
      <style:table-row-properties fo:keep-together="auto"/>
    </style:style>
    <style:style style:name="Tabla20.A1" style:family="table-cell">
      <style:table-cell-properties fo:padding-left="0.191cm" fo:padding-right="0.191cm" fo:padding-top="0cm" fo:padding-bottom="0cm" fo:border="none"/>
    </style:style>
    <style:style style:name="Tabla37" style:family="table">
      <style:table-properties style:width="14.975cm" fo:margin-left="0cm" fo:margin-top="0cm" fo:margin-bottom="0cm" table:align="left" style:writing-mode="page"/>
    </style:style>
    <style:style style:name="Tabla37.A" style:family="table-column">
      <style:table-column-properties style:column-width="4.992cm"/>
    </style:style>
    <style:style style:name="Tabla37.1" style:family="table-row">
      <style:table-row-properties fo:keep-together="auto"/>
    </style:style>
    <style:style style:name="Tabla37.A1" style:family="table-cell">
      <style:table-cell-properties fo:padding-left="0.191cm" fo:padding-right="0.191cm" fo:padding-top="0cm" fo:padding-bottom="0cm" fo:border="none"/>
    </style:style>
    <style:style style:name="Tabla40" style:family="table">
      <style:table-properties style:width="14.975cm" fo:margin-left="0cm" fo:margin-top="0cm" fo:margin-bottom="0cm" table:align="left" style:writing-mode="page"/>
    </style:style>
    <style:style style:name="Tabla40.A" style:family="table-column">
      <style:table-column-properties style:column-width="4.992cm"/>
    </style:style>
    <style:style style:name="Tabla40.1" style:family="table-row">
      <style:table-row-properties fo:keep-together="auto"/>
    </style:style>
    <style:style style:name="Tabla40.A1" style:family="table-cell">
      <style:table-cell-properties fo:padding-left="0.191cm" fo:padding-right="0.191cm" fo:padding-top="0cm" fo:padding-bottom="0cm" fo:border="none"/>
    </style:style>
    <style:style style:name="Tabla45" style:family="table">
      <style:table-properties style:width="14.975cm" fo:margin-left="0cm" fo:margin-top="0cm" fo:margin-bottom="0cm" table:align="left" style:writing-mode="page"/>
    </style:style>
    <style:style style:name="Tabla45.A" style:family="table-column">
      <style:table-column-properties style:column-width="4.992cm"/>
    </style:style>
    <style:style style:name="Tabla45.1" style:family="table-row">
      <style:table-row-properties fo:keep-together="auto"/>
    </style:style>
    <style:style style:name="Tabla45.A1" style:family="table-cell">
      <style:table-cell-properties fo:padding-left="0.191cm" fo:padding-right="0.191cm" fo:padding-top="0cm" fo:padding-bottom="0cm" fo:border="none"/>
    </style:style>
    <style:style style:name="Tabla47" style:family="table">
      <style:table-properties style:width="14.975cm" fo:margin-left="0cm" fo:margin-top="0cm" fo:margin-bottom="0cm" table:align="left" style:writing-mode="page"/>
    </style:style>
    <style:style style:name="Tabla47.A" style:family="table-column">
      <style:table-column-properties style:column-width="4.992cm"/>
    </style:style>
    <style:style style:name="Tabla47.1" style:family="table-row">
      <style:table-row-properties fo:keep-together="auto"/>
    </style:style>
    <style:style style:name="Tabla47.A1" style:family="table-cell">
      <style:table-cell-properties fo:padding-left="0.191cm" fo:padding-right="0.191cm" fo:padding-top="0cm" fo:padding-bottom="0cm" fo:border="none"/>
    </style:style>
    <style:style style:name="Tabla50" style:family="table">
      <style:table-properties style:width="14.975cm" fo:margin-left="0cm" fo:margin-top="0cm" fo:margin-bottom="0cm" table:align="left" style:writing-mode="page"/>
    </style:style>
    <style:style style:name="Tabla50.A" style:family="table-column">
      <style:table-column-properties style:column-width="4.992cm"/>
    </style:style>
    <style:style style:name="Tabla50.1" style:family="table-row">
      <style:table-row-properties fo:keep-together="auto"/>
    </style:style>
    <style:style style:name="Tabla50.A1" style:family="table-cell">
      <style:table-cell-properties fo:padding-left="0.191cm" fo:padding-right="0.191cm" fo:padding-top="0cm" fo:padding-bottom="0cm" fo:border="none"/>
    </style:style>
    <style:style style:name="Tabla52" style:family="table">
      <style:table-properties style:width="14.975cm" fo:margin-left="0cm" fo:margin-top="0cm" fo:margin-bottom="0cm" table:align="left" style:writing-mode="page"/>
    </style:style>
    <style:style style:name="Tabla52.A" style:family="table-column">
      <style:table-column-properties style:column-width="4.992cm"/>
    </style:style>
    <style:style style:name="Tabla52.1" style:family="table-row">
      <style:table-row-properties fo:keep-together="auto"/>
    </style:style>
    <style:style style:name="Tabla52.A1" style:family="table-cell">
      <style:table-cell-properties fo:padding-left="0.191cm" fo:padding-right="0.191cm" fo:padding-top="0cm" fo:padding-bottom="0cm" fo:border="none"/>
    </style:style>
    <style:style style:name="Tabla57" style:family="table">
      <style:table-properties style:width="14.975cm" fo:margin-left="0cm" fo:margin-top="0cm" fo:margin-bottom="0cm" table:align="left" style:writing-mode="page"/>
    </style:style>
    <style:style style:name="Tabla57.A" style:family="table-column">
      <style:table-column-properties style:column-width="4.992cm"/>
    </style:style>
    <style:style style:name="Tabla57.1" style:family="table-row">
      <style:table-row-properties fo:keep-together="auto"/>
    </style:style>
    <style:style style:name="Tabla57.A1" style:family="table-cell">
      <style:table-cell-properties fo:padding-left="0.191cm" fo:padding-right="0.191cm" fo:padding-top="0cm" fo:padding-bottom="0cm" fo:border="non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45cm" fo:margin-bottom="1.245cm" fo:margin-left="2.489cm" fo:margin-right="2.489cm" style:writing-mode="lr-tb" style:layout-grid-color="#c0c0c0" style:layout-grid-lines="150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1.752cm" fo:margin-left="0cm" fo:margin-right="0cm" fo:margin-top="1.653cm" style:dynamic-spacing="true"/>
      </style:footer-style>
    </style:page-layout>
    <style:page-layout style:name="Mpm3">
      <style:page-layout-properties fo:page-width="21.001cm" fo:page-height="29.7cm" style:num-format="1" style:print-orientation="portrait" fo:margin-top="1.249cm" fo:margin-bottom="1.249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2.54cm" fo:margin-right="2.54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59cm" fo:margin-left="0cm" fo:margin-right="0cm" fo:margin-bottom="2.45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a11" table:style-name="Tabla11">
          <table:table-column table:style-name="Tabla11.A" table:number-columns-repeated="3"/>
          <table:table-row table:style-name="Tabla11.1">
            <table:table-cell table:style-name="Tabla11.A1" office:value-type="string">
              <text:p text:style-name="Standard"/>
            </table:table-cell>
            <table:table-cell table:style-name="Tabla11.A1" office:value-type="string">
              <text:p text:style-name="Standard"/>
            </table:table-cell>
            <table:table-cell table:style-name="Tabla11.A1" office:value-type="string">
              <text:p text:style-name="Standard"/>
            </table:table-cell>
          </table:table-row>
        </table:table>
        <text:p text:style-name="Standard"/>
      </style:header>
      <style:header-first>
        <text:p text:style-name="Standard"/>
        <table:table table:name="Tabla14" table:style-name="Tabla14">
          <table:table-column table:style-name="Tabla14.A" table:number-columns-repeated="3"/>
          <table:table-row table:style-name="Tabla14.1">
            <table:table-cell table:style-name="Tabla14.A1" office:value-type="string">
              <text:p text:style-name="Standard"/>
            </table:table-cell>
            <table:table-cell table:style-name="Tabla14.A1" office:value-type="string">
              <text:p text:style-name="Standard"/>
            </table:table-cell>
            <table:table-cell table:style-name="Tabla14.A1" office:value-type="string">
              <text:p text:style-name="Standard"/>
            </table:table-cell>
          </table:table-row>
        </table:table>
        <text:p text:style-name="Standard"/>
      </style:header-first>
      <style:footer>
        <text:p text:style-name="Standard"/>
        <table:table table:name="Tabla13" table:style-name="Tabla13">
          <table:table-column table:style-name="Tabla13.A" table:number-columns-repeated="3"/>
          <table:table-row table:style-name="Tabla13.1">
            <table:table-cell table:style-name="Tabla13.A1" office:value-type="string">
              <text:p text:style-name="Standard"/>
            </table:table-cell>
            <table:table-cell table:style-name="Tabla13.A1" office:value-type="string">
              <text:p text:style-name="Standard"><text:page-number text:select-page="current">0</text:page-number></text:p>
            </table:table-cell>
            <table:table-cell table:style-name="Tabla13.A1" office:value-type="string">
              <text:p text:style-name="Standard"/>
            </table:table-cell>
          </table:table-row>
        </table:table>
        <text:p text:style-name="Standard"/>
      </style:footer>
      <style:footer-first>
        <text:p text:style-name="Standard"/>
        <table:table table:name="Tabla15" table:style-name="Tabla15">
          <table:table-column table:style-name="Tabla15.A" table:number-columns-repeated="3"/>
          <table:table-row table:style-name="Tabla15.1">
            <table:table-cell table:style-name="Tabla15.A1" office:value-type="string">
              <text:p text:style-name="Standard"/>
            </table:table-cell>
            <table:table-cell table:style-name="Tabla15.A1" office:value-type="string">
              <text:p text:style-name="Standard"/>
            </table:table-cell>
            <table:table-cell table:style-name="Tabla15.A1" office:value-type="string">
              <text:p text:style-name="Standard"/>
            </table:table-cell>
          </table:table-row>
        </table:table>
        <text:p text:style-name="Standard"/>
      </style:footer-first>
    </style:master-page>
    <style:master-page style:name="Converted1" style:page-layout-name="Mpm2" draw:style-name="Mdp1">
      <style:header>
        <text:p text:style-name="Standard"/>
        <table:table table:name="Tabla18" table:style-name="Tabla18">
          <table:table-column table:style-name="Tabla18.A" table:number-columns-repeated="3"/>
          <table:table-row table:style-name="Tabla18.1">
            <table:table-cell table:style-name="Tabla18.A1" office:value-type="string">
              <text:p text:style-name="Standard"/>
            </table:table-cell>
            <table:table-cell table:style-name="Tabla18.A1" office:value-type="string">
              <text:p text:style-name="Standard"/>
            </table:table-cell>
            <table:table-cell table:style-name="Tabla18.A1" office:value-type="string">
              <text:p text:style-name="Standard"/>
            </table:table-cell>
          </table:table-row>
        </table:table>
        <text:p text:style-name="Standard"/>
      </style:header>
      <style:footer>
        <text:p text:style-name="Standard"/>
        <table:table table:name="Tabla20" table:style-name="Tabla20">
          <table:table-column table:style-name="Tabla20.A" table:number-columns-repeated="3"/>
          <table:table-row table:style-name="Tabla20.1">
            <table:table-cell table:style-name="Tabla20.A1" office:value-type="string">
              <text:p text:style-name="Standard"/>
            </table:table-cell>
            <table:table-cell table:style-name="Tabla20.A1" office:value-type="string">
              <text:p text:style-name="Standard"><text:page-number text:select-page="current">0</text:page-number></text:p>
            </table:table-cell>
            <table:table-cell table:style-name="Tabla20.A1" office:value-type="string">
              <text:p text:style-name="Standard"/>
            </table:table-cell>
          </table:table-row>
        </table:table>
        <text:p text:style-name="Standard"/>
      </style:footer>
    </style:master-page>
    <style:master-page style:name="Converted2" style:page-layout-name="Mpm3" draw:style-name="Mdp1">
      <style:header>
        <table:table table:name="Tabla37" table:style-name="Tabla37">
          <table:table-column table:style-name="Tabla37.A" table:number-columns-repeated="3"/>
          <table:table-row table:style-name="Tabla37.1">
            <table:table-cell table:style-name="Tabla37.A1" office:value-type="string">
              <text:p text:style-name="Header"/>
            </table:table-cell>
            <table:table-cell table:style-name="Tabla37.A1" office:value-type="string">
              <text:p text:style-name="Header"/>
            </table:table-cell>
            <table:table-cell table:style-name="Tabla37.A1" office:value-type="string">
              <text:p text:style-name="Header"/>
            </table:table-cell>
          </table:table-row>
        </table:table>
        <text:p text:style-name="Header"/>
      </style:header>
      <style:footer>
        <text:p text:style-name="Footer"><text:page-number text:select-page="current">23</text:page-number></text:p>
        <text:p text:style-name="Footer"/>
      </style:footer>
    </style:master-page>
    <style:master-page style:name="Converted3" style:page-layout-name="Mpm4" draw:style-name="Mdp1">
      <style:header>
        <table:table table:name="Tabla40" table:style-name="Tabla40">
          <table:table-column table:style-name="Tabla40.A" table:number-columns-repeated="3"/>
          <table:table-row table:style-name="Tabla40.1">
            <table:table-cell table:style-name="Tabla40.A1" office:value-type="string">
              <text:p text:style-name="Header"/>
            </table:table-cell>
            <table:table-cell table:style-name="Tabla40.A1" office:value-type="string">
              <text:p text:style-name="Header"/>
            </table:table-cell>
            <table:table-cell table:style-name="Tabla40.A1" office:value-type="string">
              <text:p text:style-name="Header"/>
            </table:table-cell>
          </table:table-row>
        </table:table>
        <text:p text:style-name="Header"/>
      </style:header>
      <style:footer>
        <text:p text:style-name="Footer"><text:page-number text:select-page="current">24</text:page-number></text:p>
        <text:p text:style-name="Footer"/>
      </style:footer>
    </style:master-page>
    <style:master-page style:name="Converted4" style:page-layout-name="Mpm3" draw:style-name="Mdp1">
      <style:header>
        <table:table table:name="Tabla45" table:style-name="Tabla45">
          <table:table-column table:style-name="Tabla45.A" table:number-columns-repeated="3"/>
          <table:table-row table:style-name="Tabla45.1">
            <table:table-cell table:style-name="Tabla45.A1" office:value-type="string">
              <text:p text:style-name="Header"/>
            </table:table-cell>
            <table:table-cell table:style-name="Tabla45.A1" office:value-type="string">
              <text:p text:style-name="Header"/>
            </table:table-cell>
            <table:table-cell table:style-name="Tabla45.A1" office:value-type="string">
              <text:p text:style-name="Header"/>
            </table:table-cell>
          </table:table-row>
        </table:table>
        <text:p text:style-name="Header"/>
      </style:header>
      <style:footer>
        <text:p text:style-name="Footer"><text:page-number text:select-page="current">27</text:page-number></text:p>
        <text:p text:style-name="Footer"/>
      </style:footer>
    </style:master-page>
    <style:master-page style:name="Converted5" style:page-layout-name="Mpm4" draw:style-name="Mdp1">
      <style:header>
        <table:table table:name="Tabla47" table:style-name="Tabla47">
          <table:table-column table:style-name="Tabla47.A" table:number-columns-repeated="3"/>
          <table:table-row table:style-name="Tabla47.1">
            <table:table-cell table:style-name="Tabla47.A1" office:value-type="string">
              <text:p text:style-name="Header"/>
            </table:table-cell>
            <table:table-cell table:style-name="Tabla47.A1" office:value-type="string">
              <text:p text:style-name="Header"/>
            </table:table-cell>
            <table:table-cell table:style-name="Tabla47.A1" office:value-type="string">
              <text:p text:style-name="Header"/>
            </table:table-cell>
          </table:table-row>
        </table:table>
        <text:p text:style-name="Header"/>
      </style:header>
      <style:footer>
        <text:p text:style-name="Footer"><text:page-number text:select-page="current">38</text:page-number></text:p>
        <text:p text:style-name="Footer"/>
      </style:footer>
    </style:master-page>
    <style:master-page style:name="Converted6" style:page-layout-name="Mpm3" draw:style-name="Mdp1">
      <style:header>
        <table:table table:name="Tabla50" table:style-name="Tabla50">
          <table:table-column table:style-name="Tabla50.A" table:number-columns-repeated="3"/>
          <table:table-row table:style-name="Tabla50.1">
            <table:table-cell table:style-name="Tabla50.A1" office:value-type="string">
              <text:p text:style-name="Header"/>
            </table:table-cell>
            <table:table-cell table:style-name="Tabla50.A1" office:value-type="string">
              <text:p text:style-name="Header"/>
            </table:table-cell>
            <table:table-cell table:style-name="Tabla50.A1" office:value-type="string">
              <text:p text:style-name="Header"/>
            </table:table-cell>
          </table:table-row>
        </table:table>
        <text:p text:style-name="Header"/>
      </style:header>
      <style:footer>
        <text:p text:style-name="Footer"><text:page-number text:select-page="current">40</text:page-number></text:p>
        <text:p text:style-name="Footer"/>
      </style:footer>
    </style:master-page>
    <style:master-page style:name="Converted7" style:page-layout-name="Mpm4" draw:style-name="Mdp1">
      <style:header>
        <table:table table:name="Tabla52" table:style-name="Tabla52">
          <table:table-column table:style-name="Tabla52.A" table:number-columns-repeated="3"/>
          <table:table-row table:style-name="Tabla52.1">
            <table:table-cell table:style-name="Tabla52.A1" office:value-type="string">
              <text:p text:style-name="Header"/>
            </table:table-cell>
            <table:table-cell table:style-name="Tabla52.A1" office:value-type="string">
              <text:p text:style-name="Header"/>
            </table:table-cell>
            <table:table-cell table:style-name="Tabla52.A1" office:value-type="string">
              <text:p text:style-name="Header"/>
            </table:table-cell>
          </table:table-row>
        </table:table>
        <text:p text:style-name="Header"/>
      </style:header>
      <style:footer>
        <text:p text:style-name="Footer"><text:page-number text:select-page="current">41</text:page-number></text:p>
        <text:p text:style-name="Footer"/>
      </style:footer>
    </style:master-page>
    <style:master-page style:name="Converted8" style:page-layout-name="Mpm3" draw:style-name="Mdp1">
      <style:header>
        <table:table table:name="Tabla57" table:style-name="Tabla57">
          <table:table-column table:style-name="Tabla57.A" table:number-columns-repeated="3"/>
          <table:table-row table:style-name="Tabla57.1">
            <table:table-cell table:style-name="Tabla57.A1" office:value-type="string">
              <text:p text:style-name="Header"/>
            </table:table-cell>
            <table:table-cell table:style-name="Tabla57.A1" office:value-type="string">
              <text:p text:style-name="Header"/>
            </table:table-cell>
            <table:table-cell table:style-name="Tabla57.A1" office:value-type="string">
              <text:p text:style-name="Header"/>
            </table:table-cell>
          </table:table-row>
        </table:table>
        <text:p text:style-name="Header"/>
      </style:header>
      <style:footer>
        <text:p text:style-name="Footer"><text:page-number text:select-page="current">44</text:page-number></text:p>
        <text:p text:style-name="Footer"/>
      </style:footer>
    </style:master-page>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Index" style:page-layout-name="Mpm5"/>
    <style:master-page style:name="HTML" style:page-layout-name="Mpm9"/>
    <style:master-page style:name="Footnote" style:page-layout-name="Mpm10"/>
    <style:master-page style:name="Endnote" style:page-layout-name="Mpm10"/>
    <style:master-page style:name="Landscape"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tampado de Polos Personalizados 2.0</dc:title>
    <meta:initial-creator>EDISON ACHALMA</meta:initial-creator>
    <dc:creator>E. Edison Achalma Mendoza</dc:creator>
    <meta:editing-cycles>1079</meta:editing-cycles>
    <meta:print-date>2021-07-21T06:03:00</meta:print-date>
    <meta:creation-date>2021-05-10T11:22:00</meta:creation-date>
    <dc:date>2022-06-21T15:18:00</dc:date>
    <meta:editing-duration>PT2H55M</meta:editing-duration>
    <meta:generator>LibreOffice/24.2.4.2$Linux_X86_64 LibreOffice_project/420$Build-2</meta:generator>
    <meta:document-statistic meta:table-count="57" meta:image-count="11" meta:object-count="8" meta:page-count="44" meta:paragraph-count="2020" meta:word-count="8012" meta:character-count="47693" meta:non-whitespace-character-count="41521"/>
    <meta:user-defined meta:name="AppVersion">16.0000</meta:user-defined>
    <meta:user-defined meta:name="Company">UNSCH</meta:user-defined>
    <meta:template xlink:type="simple" xlink:actuate="onRequest" xlink:title="Normal.dotm" xlink:href=""/>
  </office:meta>
</office:document-meta>
</file>

<file path=Object 3/content.xml><?xml version="1.0" encoding="utf-8"?>
<math xmlns="http://www.w3.org/1998/Math/MathML" display="block">
  <semantics>
    <mrow>
      <mrow>
        <mi mathvariant="italic">Kurt</mi>
        <mo stretchy="false">=</mo>
        <mi mathvariant="italic">Rf</mi>
      </mrow>
      <mrow>
        <mi mathvariant="italic">usa</mi>
        <mo stretchy="false">+</mo>
        <msub>
          <mi>β</mi>
          <mi>u</mi>
        </msub>
      </mrow>
      <mrow>
        <mi mathvariant="italic">totalME</mi>
        <mo stretchy="false">∗</mo>
        <mrow>
          <mo fence="true" form="prefix" stretchy="true">(</mo>
          <mrow>
            <mrow>
              <mi mathvariant="italic">Rm</mi>
              <mo stretchy="false">−</mo>
              <mi mathvariant="italic">Rf</mi>
            </mrow>
          </mrow>
          <mo fence="true" form="postfix" stretchy="true">)</mo>
        </mrow>
      </mrow>
      <mrow>
        <mi mathvariant="italic">usa</mi>
        <mo stretchy="false">+</mo>
        <mi mathvariant="italic">Rp</mi>
      </mrow>
      <mi mathvariant="italic">per</mi>
      <mi>ú</mi>
    </mrow>
    <annotation encoding="StarMath 5.0">Kurt = Rf   usa + {β} rsub {u} totalME * left (Rm - Rf right ) usa + Rp   per ú</annotation>
  </semantics>
</math>
</file>

<file path=Object 4/content.xml><?xml version="1.0" encoding="utf-8"?>
<math xmlns="http://www.w3.org/1998/Math/MathML" display="block">
  <semantics>
    <mrow>
      <mi mathvariant="italic">Kwac</mi>
      <mrow>
        <mi mathvariant="italic">rt</mi>
        <mo stretchy="false">=</mo>
        <mrow>
          <mrow>
            <mfrac>
              <mi>E</mi>
              <mi>V</mi>
            </mfrac>
            <mo stretchy="false">∗</mo>
            <mi mathvariant="italic">Kert</mi>
          </mrow>
          <mo stretchy="false">+</mo>
          <mrow>
            <mfrac>
              <mi>D</mi>
              <mi>V</mi>
            </mfrac>
            <mo stretchy="false">∗</mo>
            <mi mathvariant="italic">Kd</mi>
            <mo stretchy="false">∗</mo>
            <mrow>
              <mo fence="true" form="prefix" stretchy="false">(</mo>
              <mrow>
                <mrow>
                  <mn>1</mn>
                  <mo stretchy="false">−</mo>
                  <mi>t</mi>
                </mrow>
              </mrow>
              <mo fence="true" form="postfix" stretchy="false">)</mo>
            </mrow>
          </mrow>
        </mrow>
      </mrow>
    </mrow>
    <annotation encoding="StarMath 5.0">Kwac   rt = {E} over {V} * Kert + {D} over {V} * Kd *(1- t )</annotation>
  </semantics>
</math>
</file>

<file path=Object 5/content.xml><?xml version="1.0" encoding="utf-8"?>
<math xmlns="http://www.w3.org/1998/Math/MathML" display="block">
  <semantics>
    <mrow>
      <munderover>
        <mo stretchy="false">∑</mo>
        <mrow>
          <mi>t</mi>
          <mo stretchy="false">=</mo>
          <mn>1</mn>
        </mrow>
        <mi>n</mi>
      </munderover>
      <mrow>
        <mfrac>
          <msub>
            <mi>F</mi>
            <mi>t</mi>
          </msub>
          <msup>
            <mrow>
              <mo fence="true" form="prefix" stretchy="false">(</mo>
              <mrow>
                <mrow>
                  <mn>1</mn>
                  <mo stretchy="false">+</mo>
                  <mi>k</mi>
                </mrow>
              </mrow>
              <mo fence="true" form="postfix" stretchy="false">)</mo>
            </mrow>
            <mi>t</mi>
          </msup>
        </mfrac>
        <mo stretchy="false">−</mo>
        <msub>
          <mi>I</mi>
          <mi>o</mi>
        </msub>
      </mrow>
    </mrow>
    <annotation encoding="StarMath 5.0">sum from {t=1} to {n} {{{F} rsub {t}} over {{(1+k)} ^ {t}} - {I} rsub {o}}</annotation>
  </semantics>
</math>
</file>

<file path=Object 6/content.xml><?xml version="1.0" encoding="utf-8"?>
<math xmlns="http://www.w3.org/1998/Math/MathML" display="block">
  <semantics>
    <mrow>
      <mn>0</mn>
      <mo stretchy="false">=</mo>
      <mrow>
        <munderover>
          <mo stretchy="false">∑</mo>
          <mrow>
            <mi>t</mi>
            <mo stretchy="false">=</mo>
            <mn>1</mn>
          </mrow>
          <mi>n</mi>
        </munderover>
        <mrow>
          <mfrac>
            <msub>
              <mi>F</mi>
              <mi>t</mi>
            </msub>
            <msup>
              <mrow>
                <mo fence="true" form="prefix" stretchy="false">(</mo>
                <mrow>
                  <mrow>
                    <mn>1</mn>
                    <mo stretchy="false">+</mo>
                    <mi>k</mi>
                  </mrow>
                </mrow>
                <mo fence="true" form="postfix" stretchy="false">)</mo>
              </mrow>
              <mi>t</mi>
            </msup>
          </mfrac>
          <mo stretchy="false">−</mo>
          <msub>
            <mi>I</mi>
            <mi>o</mi>
          </msub>
        </mrow>
      </mrow>
    </mrow>
    <annotation encoding="StarMath 5.0">0= sum from {t=1} to {n} {{{F} rsub {t}} over {{(1+k)} ^ {t}} - {I} rsub {o}}</annotation>
  </semantics>
</math>
</file>

<file path=Object 7/content.xml><?xml version="1.0" encoding="utf-8"?>
<math xmlns="http://www.w3.org/1998/Math/MathML" display="block">
  <semantics>
    <mrow>
      <munderover>
        <mo stretchy="false">∑</mo>
        <mrow>
          <mi>t</mi>
          <mo stretchy="false">=</mo>
          <mn>1</mn>
        </mrow>
        <mi>n</mi>
      </munderover>
      <mrow>
        <mfrac>
          <msub>
            <mi>F</mi>
            <mi>t</mi>
          </msub>
          <msup>
            <mrow>
              <mo fence="true" form="prefix" stretchy="false">(</mo>
              <mrow>
                <mrow>
                  <mn>1</mn>
                  <mo stretchy="false">+</mo>
                  <mi>k</mi>
                </mrow>
              </mrow>
              <mo fence="true" form="postfix" stretchy="false">)</mo>
            </mrow>
            <mi>t</mi>
          </msup>
        </mfrac>
        <mo stretchy="false">−</mo>
        <msub>
          <mi>I</mi>
          <mi>o</mi>
        </msub>
        <mo stretchy="false">+</mo>
        <mi>D</mi>
      </mrow>
    </mrow>
    <annotation encoding="StarMath 5.0">sum from {t=1} to {n} {{{F} rsub {t}} over {{(1+k)} ^ {t}} - {I} rsub {o} +D}</annotation>
  </semantics>
</math>
</file>

<file path=Object 8/content.xml><?xml version="1.0" encoding="utf-8"?>
<math xmlns="http://www.w3.org/1998/Math/MathML" display="block">
  <semantics>
    <mrow>
      <mn>0</mn>
      <mo stretchy="false">=</mo>
      <mrow>
        <munderover>
          <mo stretchy="false">∑</mo>
          <mrow>
            <mi>t</mi>
            <mo stretchy="false">=</mo>
            <mn>1</mn>
          </mrow>
          <mi>n</mi>
        </munderover>
        <mrow>
          <mfrac>
            <msub>
              <mi>F</mi>
              <mi>t</mi>
            </msub>
            <msup>
              <mrow>
                <mo fence="true" form="prefix" stretchy="false">(</mo>
                <mrow>
                  <mrow>
                    <mn>1</mn>
                    <mo stretchy="false">+</mo>
                    <mi>k</mi>
                  </mrow>
                </mrow>
                <mo fence="true" form="postfix" stretchy="false">)</mo>
              </mrow>
              <mi>t</mi>
            </msup>
          </mfrac>
          <mo stretchy="false">−</mo>
          <msub>
            <mi>I</mi>
            <mi>o</mi>
          </msub>
          <mo stretchy="false">+</mo>
          <mi>D</mi>
        </mrow>
      </mrow>
    </mrow>
    <annotation encoding="StarMath 5.0">0= sum from {t=1} to {n} {{{F} rsub {t}} over {{(1+k)} ^ {t}} - {I} rsub {o} +D}</annotation>
  </semantics>
</math>
</file>