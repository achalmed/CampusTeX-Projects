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6cm"/>
    </style:style>
    <style:style style:name="co2" style:family="table-column">
      <style:table-column-properties fo:break-before="auto" style:column-width="7.562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79cm"/>
    </style:style>
    <style:style style:name="co5" style:family="table-column">
      <style:table-column-properties fo:break-before="auto" style:column-width="2.887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374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1.7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106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FCE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203864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1f4e79" style:rotation-align="non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1f4e79" style:rotation-align="non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ffff00" style:rotation-align="none"/>
    </style:style>
    <style:style style:name="ce11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2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2">
      <style:table-cell-properties style:rotation-align="none"/>
    </style:style>
    <style:style style:name="ce2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149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5" style:family="table-cell" style:parent-style-name="Default" style:data-style-name="N149">
      <style:table-cell-properties style:rotation-align="none"/>
    </style:style>
    <style:style style:name="ce26" style:family="table-cell" style:parent-style-name="Default" style:data-style-name="N149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7" style:family="table-cell" style:parent-style-name="Default" style:data-style-name="N149">
      <style:table-cell-properties fo:background-color="#1f4e79" style:rotation-align="non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1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48">
      <style:table-cell-properties fo:background-color="#00b050" style:rotation-align="none"/>
    </style:style>
    <style:style style:name="ce31" style:family="table-cell" style:parent-style-name="Default" style:data-style-name="N10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4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1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2">
      <style:table-cell-properties fo:background-color="#1f4e79" style:rotation-align="non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12" table:number-rows-spanned="1">
            <text:p>TALLER DE FLUJO DE CAJA -UNAH</text:p>
          </table:table-cell>
          <table:covered-table-cell table:number-columns-repeated="11" table:style-name="ce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12" table:number-rows-spanned="1">
            <text:p>1. PROGRAMA DE PRODUCCIÓN</text:p>
          </table:table-cell>
          <table:covered-table-cell table:number-columns-repeated="11" table:style-name="ce12"/>
          <table:table-cell table:number-columns-repeated="16371"/>
        </table:table-row>
        <table:table-row table:style-name="ro1">
          <table:table-cell/>
          <table:table-cell table:style-name="ce2" office:value-type="string" calcext:value-type="string">
            <text:p>Rubr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roducción y ventas(en unidades)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6]*1.2" office:value-type="float" office:value="1200" calcext:value-type="float">
            <text:p>1200</text:p>
          </table:table-cell>
          <table:table-cell table:formula="of:=[.E6]*1.05" office:value-type="float" office:value="1260" calcext:value-type="float">
            <text:p>1260</text:p>
          </table:table-cell>
          <table:table-cell table:formula="of:=[.F6]*1.02" office:value-type="float" office:value="1285.2" calcext:value-type="float">
            <text:p>1285.2</text:p>
          </table:table-cell>
          <table:table-cell table:formula="of:=[.G6]*1.02" office:value-type="float" office:value="1310.904" calcext:value-type="float">
            <text:p>1310.904</text:p>
          </table:table-cell>
          <table:table-cell table:formula="of:=[.H6]*1.02" office:value-type="float" office:value="1337.12208" calcext:value-type="float">
            <text:p>1337.12208</text:p>
          </table:table-cell>
          <table:table-cell table:formula="of:=[.I6]*1.02" office:value-type="float" office:value="1363.8645216" calcext:value-type="float">
            <text:p>1363.8645216</text:p>
          </table:table-cell>
          <table:table-cell table:formula="of:=[.J6]*1.02" office:value-type="float" office:value="1391.141812032" calcext:value-type="float">
            <text:p>1391.141812032</text:p>
          </table:table-cell>
          <table:table-cell table:formula="of:=[.K6]*1.02" office:value-type="float" office:value="1418.96464827264" calcext:value-type="float">
            <text:p>1418.96464827264</text:p>
          </table:table-cell>
          <table:table-cell table:formula="of:=[.L6]*1.02" office:value-type="float" office:value="1447.34394123809" calcext:value-type="float">
            <text:p>1447.34394123809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Precio de venta (por unidad)</text:p>
          </table:table-cell>
          <table:table-cell table:style-name="ce3"/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7" table:style-name="ce3"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2. PRESUPUESTO DE INVERSIÓN</text:p>
          </table:table-cell>
          <table:covered-table-cell table:style-name="ce12"/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Activos</text:p>
          </table:table-cell>
          <table:table-cell table:style-name="ce2" office:value-type="string" calcext:value-type="string">
            <text:p>Año 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dquisición de terreno</text:p>
          </table:table-cell>
          <table:table-cell table:style-name="ce13" office:value-type="float" office:value="80000" calcext:value-type="float">
            <text:p>8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ntrucción en edificaciones</text:p>
          </table:table-cell>
          <table:table-cell table:style-name="ce13" office:value-type="float" office:value="200000" calcext:value-type="float">
            <text:p>20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quinarias</text:p>
          </table:table-cell>
          <table:table-cell table:style-name="ce13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Total inversión Fija</text:p>
          </table:table-cell>
          <table:table-cell table:style-name="ce14" table:formula="of:=SUM([.C11:.C13])" office:value-type="float" office:value="380000" calcext:value-type="float">
            <text:p>38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pital de trabjo</text:p>
          </table:table-cell>
          <table:table-cell table:style-name="ce15" table:formula="of:=[.C65]" office:value-type="float" office:value="-25000" calcext:value-type="float">
            <text:p>-25000.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Total de Capital de trabajo</text:p>
          </table:table-cell>
          <table:table-cell table:style-name="ce16" table:formula="of:=-[.C15]" office:value-type="float" office:value="25000" calcext:value-type="float">
            <text:p>25000.0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string" calcext:value-type="string">
            <text:p>Total de inversión</text:p>
          </table:table-cell>
          <table:table-cell table:style-name="ce17" table:formula="of:=[.C14]+[.C16]" office:value-type="float" office:value="405000" calcext:value-type="float">
            <text:p>4050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3. TABLA DE DEPRECIACIONES</text:p>
          </table:table-cell>
          <table:covered-table-cell table:number-columns-repeated="6" table:style-name="ce12"/>
          <table:table-cell table:number-columns-repeated="16376"/>
        </table:table-row>
        <table:table-row table:style-name="ro2">
          <table:table-cell/>
          <table:table-cell table:style-name="ce6" office:value-type="string" calcext:value-type="string">
            <text:p>Activos</text:p>
          </table:table-cell>
          <table:table-cell table:style-name="ce18" office:value-type="string" calcext:value-type="string">
            <text:p>Valor compra</text:p>
          </table:table-cell>
          <table:table-cell table:style-name="ce18" office:value-type="string" calcext:value-type="string">
            <text:p>Vida util</text:p>
          </table:table-cell>
          <table:table-cell table:style-name="ce18" office:value-type="string" calcext:value-type="string">
            <text:p>Dep anual (1-6)</text:p>
          </table:table-cell>
          <table:table-cell table:style-name="ce18" office:value-type="string" calcext:value-type="string">
            <text:p>Dep anual (7-10)</text:p>
          </table:table-cell>
          <table:table-cell table:style-name="ce18" office:value-type="string" calcext:value-type="string">
            <text:p>Dep Acumulada</text:p>
          </table:table-cell>
          <table:table-cell table:style-name="ce18" office:value-type="string" calcext:value-type="string">
            <text:p>Valor de recupero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formula="of:=[.B12]" office:value-type="string" office:string-value="Contrucción en edificaciones" calcext:value-type="string">
            <text:p>Contrucción en edificaciones</text:p>
          </table:table-cell>
          <table:table-cell table:style-name="ce19" table:formula="of:=[.C12]" office:value-type="float" office:value="200000" calcext:value-type="float">
            <text:p>2000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[.C21]*(1/[.D21])" office:value-type="float" office:value="5000" calcext:value-type="float">
            <text:p>5000</text:p>
          </table:table-cell>
          <table:table-cell table:style-name="ce19" table:formula="of:=[.E21]" office:value-type="float" office:value="5000" calcext:value-type="float">
            <text:p>5000</text:p>
          </table:table-cell>
          <table:table-cell table:style-name="ce19" table:formula="of:=[.E21]*10" office:value-type="float" office:value="50000" calcext:value-type="float">
            <text:p>50000</text:p>
          </table:table-cell>
          <table:table-cell table:style-name="ce19" table:formula="of:=[.C21]-[.G21]" office:value-type="float" office:value="150000" calcext:value-type="float">
            <text:p>150000</text:p>
          </table:table-cell>
          <table:table-cell table:number-columns-repeated="16376"/>
        </table:table-row>
        <table:table-row table:style-name="ro1">
          <table:table-cell/>
          <table:table-cell table:formula="of:=[.B13]" office:value-type="string" office:string-value="Maquinarias" calcext:value-type="string">
            <text:p>Maquinarias</text:p>
          </table:table-cell>
          <table:table-cell table:style-name="ce19" table:formula="of:=[.C13]" office:value-type="float" office:value="100000" calcext:value-type="float">
            <text:p>100000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C22]*(1/[.D22])" office:value-type="float" office:value="10000" calcext:value-type="float">
            <text:p>10000</text:p>
          </table:table-cell>
          <table:table-cell table:style-name="ce19"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quinarias (depues de 6 año)</text:p>
          </table:table-cell>
          <table:table-cell table:style-name="ce13" table:formula="of:=[.C13]" office:value-type="float" office:value="100000" calcext:value-type="float">
            <text:p>1000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C23]*(1/[.D23])" office:value-type="float" office:value="10000" calcext:value-type="float">
            <text:p>10000</text:p>
          </table:table-cell>
          <table:table-cell table:style-name="ce13" table:formula="of:=[.F23]*4" office:value-type="float" office:value="40000" calcext:value-type="float">
            <text:p>40000</text:p>
          </table:table-cell>
          <table:table-cell table:style-name="ce19" table:formula="of:=[.C23]-[.G23]" office:value-type="float" office:value="60000" calcext:value-type="float">
            <text:p>6000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5"/>
          <table:table-cell table:style-name="ce17"/>
          <table:table-cell table:style-name="ce17" table:formula="of:=SUM([.E21:.E23])" office:value-type="float" office:value="15000" calcext:value-type="float">
            <text:p>15000</text:p>
          </table:table-cell>
          <table:table-cell table:style-name="ce17" table:formula="of:=SUM([.F21:.F23])" office:value-type="float" office:value="15000" calcext:value-type="float">
            <text:p>15000</text:p>
          </table:table-cell>
          <table:table-cell table:style-name="ce17" table:formula="of:=SUM([.G21:.G23])" office:value-type="float" office:value="90000" calcext:value-type="float">
            <text:p>90000</text:p>
          </table:table-cell>
          <table:table-cell table:style-name="ce17" table:formula="of:=SUM([.H21:.H23])" office:value-type="float" office:value="210000" calcext:value-type="float">
            <text:p>210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12" table:number-rows-spanned="1">
            <text:p>4.1 ESTADO DE RESULTADOS CON DEPRECIACIONES</text:p>
          </table:table-cell>
          <table:covered-table-cell table:number-columns-repeated="11" table:style-name="ce12"/>
          <table:table-cell table:number-columns-repeated="16371"/>
        </table:table-row>
        <table:table-row table:style-name="ro1">
          <table:table-cell/>
          <table:table-cell table:style-name="ce2" office:value-type="string" calcext:value-type="string">
            <text:p>Rubr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Ventas Netas</text:p>
          </table:table-cell>
          <table:table-cell table:style-name="ce20"/>
          <table:table-cell table:style-name="ce25" table:formula="of:=[.D6]*[.D7]" office:value-type="float" office:value="100000" calcext:value-type="float">
            <text:p>100000.0</text:p>
          </table:table-cell>
          <table:table-cell table:style-name="ce25" table:formula="of:=[.E6]*[.E7]" office:value-type="float" office:value="120000" calcext:value-type="float">
            <text:p>120000.0</text:p>
          </table:table-cell>
          <table:table-cell table:style-name="ce25" table:formula="of:=[.F6]*[.F7]" office:value-type="float" office:value="126000" calcext:value-type="float">
            <text:p>126000.0</text:p>
          </table:table-cell>
          <table:table-cell table:style-name="ce25" table:formula="of:=[.G6]*[.G7]" office:value-type="float" office:value="141372" calcext:value-type="float">
            <text:p>141372.0</text:p>
          </table:table-cell>
          <table:table-cell table:style-name="ce25" table:formula="of:=[.H6]*[.H7]" office:value-type="float" office:value="144199.44" calcext:value-type="float">
            <text:p>144199.4</text:p>
          </table:table-cell>
          <table:table-cell table:style-name="ce25" table:formula="of:=[.I6]*[.I7]" office:value-type="float" office:value="147083.4288" calcext:value-type="float">
            <text:p>147083.4</text:p>
          </table:table-cell>
          <table:table-cell table:style-name="ce25" table:formula="of:=[.J6]*[.J7]" office:value-type="float" office:value="150025.097376" calcext:value-type="float">
            <text:p>150025.1</text:p>
          </table:table-cell>
          <table:table-cell table:style-name="ce25" table:formula="of:=[.K6]*[.K7]" office:value-type="float" office:value="153025.59932352" calcext:value-type="float">
            <text:p>153025.6</text:p>
          </table:table-cell>
          <table:table-cell table:style-name="ce25" table:formula="of:=[.L6]*[.L7]" office:value-type="float" office:value="156086.11130999" calcext:value-type="float">
            <text:p>156086.1</text:p>
          </table:table-cell>
          <table:table-cell table:style-name="ce25" table:formula="of:=[.M6]*[.M7]" office:value-type="float" office:value="159207.83353619" calcext:value-type="float">
            <text:p>159207.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osto variable</text:p>
          </table:table-cell>
          <table:table-cell/>
          <table:table-cell table:style-name="ce25" table:formula="of:=[.D6]*30" office:value-type="float" office:value="30000" calcext:value-type="float">
            <text:p>30000.0</text:p>
          </table:table-cell>
          <table:table-cell table:style-name="ce25" table:formula="of:=[.E6]*30" office:value-type="float" office:value="36000" calcext:value-type="float">
            <text:p>36000.0</text:p>
          </table:table-cell>
          <table:table-cell table:style-name="ce25" table:formula="of:=[.F6]*30" office:value-type="float" office:value="37800" calcext:value-type="float">
            <text:p>37800.0</text:p>
          </table:table-cell>
          <table:table-cell table:style-name="ce25" table:formula="of:=[.G6]*30" office:value-type="float" office:value="38556" calcext:value-type="float">
            <text:p>38556.0</text:p>
          </table:table-cell>
          <table:table-cell table:style-name="ce25" table:formula="of:=[.H6]*30" office:value-type="float" office:value="39327.12" calcext:value-type="float">
            <text:p>39327.1</text:p>
          </table:table-cell>
          <table:table-cell table:style-name="ce25" table:formula="of:=[.I6]*30" office:value-type="float" office:value="40113.6624" calcext:value-type="float">
            <text:p>40113.7</text:p>
          </table:table-cell>
          <table:table-cell table:style-name="ce25" table:formula="of:=[.J6]*30" office:value-type="float" office:value="40915.935648" calcext:value-type="float">
            <text:p>40915.9</text:p>
          </table:table-cell>
          <table:table-cell table:style-name="ce25" table:formula="of:=[.K6]*30" office:value-type="float" office:value="41734.25436096" calcext:value-type="float">
            <text:p>41734.3</text:p>
          </table:table-cell>
          <table:table-cell table:style-name="ce25" table:formula="of:=[.L6]*30" office:value-type="float" office:value="42568.9394481792" calcext:value-type="float">
            <text:p>42568.9</text:p>
          </table:table-cell>
          <table:table-cell table:style-name="ce25" table:formula="of:=[.M6]*30" office:value-type="float" office:value="43420.3182371428" calcext:value-type="float">
            <text:p>43420.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osto fijo</text:p>
          </table:table-cell>
          <table:table-cell/>
          <table:table-cell table:number-columns-repeated="10" table:style-name="ce25" office:value-type="float" office:value="20000" calcext:value-type="float">
            <text:p>20000.0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epreciaciones</text:p>
          </table:table-cell>
          <table:table-cell/>
          <table:table-cell table:style-name="ce25" table:formula="of:=[.E24]" office:value-type="float" office:value="15000" calcext:value-type="float">
            <text:p>15000.0</text:p>
          </table:table-cell>
          <table:table-cell table:style-name="ce25" table:formula="of:=[.D31]" office:value-type="float" office:value="15000" calcext:value-type="float">
            <text:p>15000.0</text:p>
          </table:table-cell>
          <table:table-cell table:style-name="ce25" table:formula="of:=[.E31]" office:value-type="float" office:value="15000" calcext:value-type="float">
            <text:p>15000.0</text:p>
          </table:table-cell>
          <table:table-cell table:style-name="ce25" table:formula="of:=[.F31]" office:value-type="float" office:value="15000" calcext:value-type="float">
            <text:p>15000.0</text:p>
          </table:table-cell>
          <table:table-cell table:style-name="ce25" table:formula="of:=[.G31]" office:value-type="float" office:value="15000" calcext:value-type="float">
            <text:p>15000.0</text:p>
          </table:table-cell>
          <table:table-cell table:style-name="ce25" table:formula="of:=[.H31]" office:value-type="float" office:value="15000" calcext:value-type="float">
            <text:p>15000.0</text:p>
          </table:table-cell>
          <table:table-cell table:style-name="ce25" table:formula="of:=[.I31]" office:value-type="float" office:value="15000" calcext:value-type="float">
            <text:p>15000.0</text:p>
          </table:table-cell>
          <table:table-cell table:style-name="ce25" table:formula="of:=[.J31]" office:value-type="float" office:value="15000" calcext:value-type="float">
            <text:p>15000.0</text:p>
          </table:table-cell>
          <table:table-cell table:style-name="ce25" table:formula="of:=[.K31]" office:value-type="float" office:value="15000" calcext:value-type="float">
            <text:p>15000.0</text:p>
          </table:table-cell>
          <table:table-cell table:style-name="ce25" table:formula="of:=[.L31]" office:value-type="float" office:value="15000" calcext:value-type="float">
            <text:p>15000.0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5" table:number-columns-repeated="10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Utilidad imponible</text:p>
          </table:table-cell>
          <table:table-cell table:style-name="ce4"/>
          <table:table-cell table:style-name="ce32" table:formula="of:=[.D28]-[.D29]-[.D30]-[.D31]" office:value-type="float" office:value="35000" calcext:value-type="float">
            <text:p>35000.0</text:p>
          </table:table-cell>
          <table:table-cell table:style-name="ce32" table:formula="of:=[.E28]-[.E29]-[.E30]-[.E31]" office:value-type="float" office:value="49000" calcext:value-type="float">
            <text:p>49000.0</text:p>
          </table:table-cell>
          <table:table-cell table:style-name="ce32" table:formula="of:=[.F28]-[.F29]-[.F30]-[.F31]" office:value-type="float" office:value="53200" calcext:value-type="float">
            <text:p>53200.0</text:p>
          </table:table-cell>
          <table:table-cell table:style-name="ce32" table:formula="of:=[.G28]-[.G29]-[.G30]-[.G31]" office:value-type="float" office:value="67816" calcext:value-type="float">
            <text:p>67816.0</text:p>
          </table:table-cell>
          <table:table-cell table:style-name="ce32" table:formula="of:=[.H28]-[.H29]-[.H30]-[.H31]" office:value-type="float" office:value="69872.32" calcext:value-type="float">
            <text:p>69872.3</text:p>
          </table:table-cell>
          <table:table-cell table:style-name="ce32" table:formula="of:=[.I28]-[.I29]-[.I30]-[.I31]" office:value-type="float" office:value="71969.7664" calcext:value-type="float">
            <text:p>71969.8</text:p>
          </table:table-cell>
          <table:table-cell table:style-name="ce32" table:formula="of:=[.J28]-[.J29]-[.J30]-[.J31]" office:value-type="float" office:value="74109.161728" calcext:value-type="float">
            <text:p>74109.2</text:p>
          </table:table-cell>
          <table:table-cell table:style-name="ce32" table:formula="of:=[.K28]-[.K29]-[.K30]-[.K31]" office:value-type="float" office:value="76291.34496256" calcext:value-type="float">
            <text:p>76291.3</text:p>
          </table:table-cell>
          <table:table-cell table:style-name="ce32" table:formula="of:=[.L28]-[.L29]-[.L30]-[.L31]" office:value-type="float" office:value="78517.1718618112" calcext:value-type="float">
            <text:p>78517.2</text:p>
          </table:table-cell>
          <table:table-cell table:style-name="ce32" table:formula="of:=[.M28]-[.M29]-[.M30]-[.M31]" office:value-type="float" office:value="80787.5152990475" calcext:value-type="float">
            <text:p>80787.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puetos</text:p>
          </table:table-cell>
          <table:table-cell/>
          <table:table-cell table:style-name="ce25" table:formula="of:=[.D33]*17%" office:value-type="float" office:value="5950" calcext:value-type="float">
            <text:p>5950.0</text:p>
          </table:table-cell>
          <table:table-cell table:style-name="ce25" table:formula="of:=[.E33]*17%" office:value-type="float" office:value="8330" calcext:value-type="float">
            <text:p>8330.0</text:p>
          </table:table-cell>
          <table:table-cell table:style-name="ce25" table:formula="of:=[.F33]*17%" office:value-type="float" office:value="9044" calcext:value-type="float">
            <text:p>9044.0</text:p>
          </table:table-cell>
          <table:table-cell table:style-name="ce25" table:formula="of:=[.G33]*17%" office:value-type="float" office:value="11528.72" calcext:value-type="float">
            <text:p>11528.7</text:p>
          </table:table-cell>
          <table:table-cell table:style-name="ce25" table:formula="of:=[.H33]*17%" office:value-type="float" office:value="11878.2944" calcext:value-type="float">
            <text:p>11878.3</text:p>
          </table:table-cell>
          <table:table-cell table:style-name="ce25" table:formula="of:=[.I33]*17%" office:value-type="float" office:value="12234.860288" calcext:value-type="float">
            <text:p>12234.9</text:p>
          </table:table-cell>
          <table:table-cell table:style-name="ce25" table:formula="of:=[.J33]*17%" office:value-type="float" office:value="12598.55749376" calcext:value-type="float">
            <text:p>12598.6</text:p>
          </table:table-cell>
          <table:table-cell table:style-name="ce25" table:formula="of:=[.K33]*17%" office:value-type="float" office:value="12969.5286436352" calcext:value-type="float">
            <text:p>12969.5</text:p>
          </table:table-cell>
          <table:table-cell table:style-name="ce25" table:formula="of:=[.L33]*17%" office:value-type="float" office:value="13347.9192165079" calcext:value-type="float">
            <text:p>13347.9</text:p>
          </table:table-cell>
          <table:table-cell table:style-name="ce25" table:formula="of:=[.M33]*17%" office:value-type="float" office:value="13733.8776008381" calcext:value-type="float">
            <text:p>13733.9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Utilidad Neta</text:p>
          </table:table-cell>
          <table:table-cell table:style-name="ce5"/>
          <table:table-cell table:style-name="ce33" table:formula="of:=[.D33]-[.D34]" office:value-type="float" office:value="29050" calcext:value-type="float">
            <text:p>29050.0</text:p>
          </table:table-cell>
          <table:table-cell table:style-name="ce33" table:formula="of:=[.E33]-[.E34]" office:value-type="float" office:value="40670" calcext:value-type="float">
            <text:p>40670.0</text:p>
          </table:table-cell>
          <table:table-cell table:style-name="ce33" table:formula="of:=[.F33]-[.F34]" office:value-type="float" office:value="44156" calcext:value-type="float">
            <text:p>44156.0</text:p>
          </table:table-cell>
          <table:table-cell table:style-name="ce33" table:formula="of:=[.G33]-[.G34]" office:value-type="float" office:value="56287.28" calcext:value-type="float">
            <text:p>56287.3</text:p>
          </table:table-cell>
          <table:table-cell table:style-name="ce33" table:formula="of:=[.H33]-[.H34]" office:value-type="float" office:value="57994.0256" calcext:value-type="float">
            <text:p>57994.0</text:p>
          </table:table-cell>
          <table:table-cell table:style-name="ce33" table:formula="of:=[.I33]-[.I34]" office:value-type="float" office:value="59734.906112" calcext:value-type="float">
            <text:p>59734.9</text:p>
          </table:table-cell>
          <table:table-cell table:style-name="ce33" table:formula="of:=[.J33]-[.J34]" office:value-type="float" office:value="61510.60423424" calcext:value-type="float">
            <text:p>61510.6</text:p>
          </table:table-cell>
          <table:table-cell table:style-name="ce33" table:formula="of:=[.K33]-[.K34]" office:value-type="float" office:value="63321.8163189248" calcext:value-type="float">
            <text:p>63321.8</text:p>
          </table:table-cell>
          <table:table-cell table:style-name="ce33" table:formula="of:=[.L33]-[.L34]" office:value-type="float" office:value="65169.2526453033" calcext:value-type="float">
            <text:p>65169.3</text:p>
          </table:table-cell>
          <table:table-cell table:style-name="ce33" table:formula="of:=[.M33]-[.M34]" office:value-type="float" office:value="67053.6376982094" calcext:value-type="float">
            <text:p>67053.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12" table:number-rows-spanned="1">
            <text:p>4.2 ESTADO DE RESULTADOS SIN DEPRECIACIONES</text:p>
          </table:table-cell>
          <table:covered-table-cell table:number-columns-repeated="11" table:style-name="ce12"/>
          <table:table-cell table:number-columns-repeated="16371"/>
        </table:table-row>
        <table:table-row table:style-name="ro1">
          <table:table-cell/>
          <table:table-cell table:style-name="ce2" office:value-type="string" calcext:value-type="string">
            <text:p>Rubr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Ventas Netas</text:p>
          </table:table-cell>
          <table:table-cell table:style-name="ce20"/>
          <table:table-cell table:style-name="ce25" table:formula="of:=[.D28]" office:value-type="float" office:value="100000" calcext:value-type="float">
            <text:p>100000.0</text:p>
          </table:table-cell>
          <table:table-cell table:style-name="ce25" table:formula="of:=[.E28]" office:value-type="float" office:value="120000" calcext:value-type="float">
            <text:p>120000.0</text:p>
          </table:table-cell>
          <table:table-cell table:style-name="ce25" table:formula="of:=[.F28]" office:value-type="float" office:value="126000" calcext:value-type="float">
            <text:p>126000.0</text:p>
          </table:table-cell>
          <table:table-cell table:style-name="ce25" table:formula="of:=[.G28]" office:value-type="float" office:value="141372" calcext:value-type="float">
            <text:p>141372.0</text:p>
          </table:table-cell>
          <table:table-cell table:style-name="ce25" table:formula="of:=[.H28]" office:value-type="float" office:value="144199.44" calcext:value-type="float">
            <text:p>144199.4</text:p>
          </table:table-cell>
          <table:table-cell table:style-name="ce25" table:formula="of:=[.I28]" office:value-type="float" office:value="147083.4288" calcext:value-type="float">
            <text:p>147083.4</text:p>
          </table:table-cell>
          <table:table-cell table:style-name="ce25" table:formula="of:=[.J28]" office:value-type="float" office:value="150025.097376" calcext:value-type="float">
            <text:p>150025.1</text:p>
          </table:table-cell>
          <table:table-cell table:style-name="ce25" table:formula="of:=[.K28]" office:value-type="float" office:value="153025.59932352" calcext:value-type="float">
            <text:p>153025.6</text:p>
          </table:table-cell>
          <table:table-cell table:style-name="ce25" table:formula="of:=[.L28]" office:value-type="float" office:value="156086.11130999" calcext:value-type="float">
            <text:p>156086.1</text:p>
          </table:table-cell>
          <table:table-cell table:style-name="ce25" table:formula="of:=[.M28]" office:value-type="float" office:value="159207.83353619" calcext:value-type="float">
            <text:p>159207.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osto variable</text:p>
          </table:table-cell>
          <table:table-cell/>
          <table:table-cell table:style-name="ce25" table:formula="of:=[.D29]" office:value-type="float" office:value="30000" calcext:value-type="float">
            <text:p>30000.0</text:p>
          </table:table-cell>
          <table:table-cell table:style-name="ce25" table:formula="of:=[.E29]" office:value-type="float" office:value="36000" calcext:value-type="float">
            <text:p>36000.0</text:p>
          </table:table-cell>
          <table:table-cell table:style-name="ce25" table:formula="of:=[.F29]" office:value-type="float" office:value="37800" calcext:value-type="float">
            <text:p>37800.0</text:p>
          </table:table-cell>
          <table:table-cell table:style-name="ce25" table:formula="of:=[.G29]" office:value-type="float" office:value="38556" calcext:value-type="float">
            <text:p>38556.0</text:p>
          </table:table-cell>
          <table:table-cell table:style-name="ce25" table:formula="of:=[.H29]" office:value-type="float" office:value="39327.12" calcext:value-type="float">
            <text:p>39327.1</text:p>
          </table:table-cell>
          <table:table-cell table:style-name="ce25" table:formula="of:=[.I29]" office:value-type="float" office:value="40113.6624" calcext:value-type="float">
            <text:p>40113.7</text:p>
          </table:table-cell>
          <table:table-cell table:style-name="ce25" table:formula="of:=[.J29]" office:value-type="float" office:value="40915.935648" calcext:value-type="float">
            <text:p>40915.9</text:p>
          </table:table-cell>
          <table:table-cell table:style-name="ce25" table:formula="of:=[.K29]" office:value-type="float" office:value="41734.25436096" calcext:value-type="float">
            <text:p>41734.3</text:p>
          </table:table-cell>
          <table:table-cell table:style-name="ce25" table:formula="of:=[.L29]" office:value-type="float" office:value="42568.9394481792" calcext:value-type="float">
            <text:p>42568.9</text:p>
          </table:table-cell>
          <table:table-cell table:style-name="ce25" table:formula="of:=[.M29]" office:value-type="float" office:value="43420.3182371428" calcext:value-type="float">
            <text:p>43420.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osto fijo</text:p>
          </table:table-cell>
          <table:table-cell/>
          <table:table-cell table:style-name="ce25" table:formula="of:=[.D30]" office:value-type="float" office:value="20000" calcext:value-type="float">
            <text:p>20000.0</text:p>
          </table:table-cell>
          <table:table-cell table:style-name="ce25" table:formula="of:=[.E30]" office:value-type="float" office:value="20000" calcext:value-type="float">
            <text:p>20000.0</text:p>
          </table:table-cell>
          <table:table-cell table:style-name="ce25" table:formula="of:=[.F30]" office:value-type="float" office:value="20000" calcext:value-type="float">
            <text:p>20000.0</text:p>
          </table:table-cell>
          <table:table-cell table:style-name="ce25" table:formula="of:=[.G30]" office:value-type="float" office:value="20000" calcext:value-type="float">
            <text:p>20000.0</text:p>
          </table:table-cell>
          <table:table-cell table:style-name="ce25" table:formula="of:=[.H30]" office:value-type="float" office:value="20000" calcext:value-type="float">
            <text:p>20000.0</text:p>
          </table:table-cell>
          <table:table-cell table:style-name="ce25" table:formula="of:=[.I30]" office:value-type="float" office:value="20000" calcext:value-type="float">
            <text:p>20000.0</text:p>
          </table:table-cell>
          <table:table-cell table:style-name="ce25" table:formula="of:=[.J30]" office:value-type="float" office:value="20000" calcext:value-type="float">
            <text:p>20000.0</text:p>
          </table:table-cell>
          <table:table-cell table:style-name="ce25" table:formula="of:=[.K30]" office:value-type="float" office:value="20000" calcext:value-type="float">
            <text:p>20000.0</text:p>
          </table:table-cell>
          <table:table-cell table:style-name="ce25" table:formula="of:=[.L30]" office:value-type="float" office:value="20000" calcext:value-type="float">
            <text:p>20000.0</text:p>
          </table:table-cell>
          <table:table-cell table:style-name="ce25" table:formula="of:=[.M30]" office:value-type="float" office:value="20000" calcext:value-type="float">
            <text:p>20000.0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epreciaciones</text:p>
          </table:table-cell>
          <table:table-cell/>
          <table:table-cell table:style-name="ce25"/>
          <table:table-cell table:style-name="ce25" table:formula="of:=[.D42]" office:value-type="float" office:value="0" calcext:value-type="float">
            <text:p>0.0</text:p>
          </table:table-cell>
          <table:table-cell table:style-name="ce25" table:formula="of:=[.E42]" office:value-type="float" office:value="0" calcext:value-type="float">
            <text:p>0.0</text:p>
          </table:table-cell>
          <table:table-cell table:style-name="ce25" table:formula="of:=[.F42]" office:value-type="float" office:value="0" calcext:value-type="float">
            <text:p>0.0</text:p>
          </table:table-cell>
          <table:table-cell table:style-name="ce25" table:formula="of:=[.G42]" office:value-type="float" office:value="0" calcext:value-type="float">
            <text:p>0.0</text:p>
          </table:table-cell>
          <table:table-cell table:style-name="ce25" table:formula="of:=[.H42]" office:value-type="float" office:value="0" calcext:value-type="float">
            <text:p>0.0</text:p>
          </table:table-cell>
          <table:table-cell table:style-name="ce25" table:formula="of:=[.I42]" office:value-type="float" office:value="0" calcext:value-type="float">
            <text:p>0.0</text:p>
          </table:table-cell>
          <table:table-cell table:style-name="ce25" table:formula="of:=[.J42]" office:value-type="float" office:value="0" calcext:value-type="float">
            <text:p>0.0</text:p>
          </table:table-cell>
          <table:table-cell table:style-name="ce25" table:formula="of:=[.K42]" office:value-type="float" office:value="0" calcext:value-type="float">
            <text:p>0.0</text:p>
          </table:table-cell>
          <table:table-cell table:style-name="ce25" table:formula="of:=[.L42]" office:value-type="float" office:value="0" calcext:value-type="float">
            <text:p>0.0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5" table:number-columns-repeated="10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Utilidad imponible</text:p>
          </table:table-cell>
          <table:table-cell table:style-name="ce4"/>
          <table:table-cell table:style-name="ce32" table:formula="of:=[.D39]-[.D40]-[.D41]-[.D42]" office:value-type="float" office:value="50000" calcext:value-type="float">
            <text:p>50000.0</text:p>
          </table:table-cell>
          <table:table-cell table:style-name="ce32" table:formula="of:=[.E39]-[.E40]-[.E41]-[.E42]" office:value-type="float" office:value="64000" calcext:value-type="float">
            <text:p>64000.0</text:p>
          </table:table-cell>
          <table:table-cell table:style-name="ce32" table:formula="of:=[.F39]-[.F40]-[.F41]-[.F42]" office:value-type="float" office:value="68200" calcext:value-type="float">
            <text:p>68200.0</text:p>
          </table:table-cell>
          <table:table-cell table:style-name="ce32" table:formula="of:=[.G39]-[.G40]-[.G41]-[.G42]" office:value-type="float" office:value="82816" calcext:value-type="float">
            <text:p>82816.0</text:p>
          </table:table-cell>
          <table:table-cell table:style-name="ce32" table:formula="of:=[.H39]-[.H40]-[.H41]-[.H42]" office:value-type="float" office:value="84872.32" calcext:value-type="float">
            <text:p>84872.3</text:p>
          </table:table-cell>
          <table:table-cell table:style-name="ce32" table:formula="of:=[.I39]-[.I40]-[.I41]-[.I42]" office:value-type="float" office:value="86969.7664" calcext:value-type="float">
            <text:p>86969.8</text:p>
          </table:table-cell>
          <table:table-cell table:style-name="ce32" table:formula="of:=[.J39]-[.J40]-[.J41]-[.J42]" office:value-type="float" office:value="89109.161728" calcext:value-type="float">
            <text:p>89109.2</text:p>
          </table:table-cell>
          <table:table-cell table:style-name="ce32" table:formula="of:=[.K39]-[.K40]-[.K41]-[.K42]" office:value-type="float" office:value="91291.34496256" calcext:value-type="float">
            <text:p>91291.3</text:p>
          </table:table-cell>
          <table:table-cell table:style-name="ce32" table:formula="of:=[.L39]-[.L40]-[.L41]-[.L42]" office:value-type="float" office:value="93517.1718618112" calcext:value-type="float">
            <text:p>93517.2</text:p>
          </table:table-cell>
          <table:table-cell table:style-name="ce32" table:formula="of:=[.M39]-[.M40]-[.M41]-[.M42]" office:value-type="float" office:value="95787.5152990475" calcext:value-type="float">
            <text:p>95787.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puetos (se va con el E°)</text:p>
          </table:table-cell>
          <table:table-cell/>
          <table:table-cell table:style-name="ce25" table:formula="of:=[.D44]*17%" office:value-type="float" office:value="8500" calcext:value-type="float">
            <text:p>8500.0</text:p>
          </table:table-cell>
          <table:table-cell table:style-name="ce25" table:formula="of:=[.E44]*17%" office:value-type="float" office:value="10880" calcext:value-type="float">
            <text:p>10880.0</text:p>
          </table:table-cell>
          <table:table-cell table:style-name="ce25" table:formula="of:=[.F44]*17%" office:value-type="float" office:value="11594" calcext:value-type="float">
            <text:p>11594.0</text:p>
          </table:table-cell>
          <table:table-cell table:style-name="ce25" table:formula="of:=[.G44]*17%" office:value-type="float" office:value="14078.72" calcext:value-type="float">
            <text:p>14078.7</text:p>
          </table:table-cell>
          <table:table-cell table:style-name="ce25" table:formula="of:=[.H44]*17%" office:value-type="float" office:value="14428.2944" calcext:value-type="float">
            <text:p>14428.3</text:p>
          </table:table-cell>
          <table:table-cell table:style-name="ce25" table:formula="of:=[.I44]*17%" office:value-type="float" office:value="14784.860288" calcext:value-type="float">
            <text:p>14784.9</text:p>
          </table:table-cell>
          <table:table-cell table:style-name="ce25" table:formula="of:=[.J44]*17%" office:value-type="float" office:value="15148.55749376" calcext:value-type="float">
            <text:p>15148.6</text:p>
          </table:table-cell>
          <table:table-cell table:style-name="ce25" table:formula="of:=[.K44]*17%" office:value-type="float" office:value="15519.5286436352" calcext:value-type="float">
            <text:p>15519.5</text:p>
          </table:table-cell>
          <table:table-cell table:style-name="ce25" table:formula="of:=[.L44]*17%" office:value-type="float" office:value="15897.9192165079" calcext:value-type="float">
            <text:p>15897.9</text:p>
          </table:table-cell>
          <table:table-cell table:style-name="ce25" table:formula="of:=[.M44]*17%" office:value-type="float" office:value="16283.8776008381" calcext:value-type="float">
            <text:p>16283.9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Utilidad Neta</text:p>
          </table:table-cell>
          <table:table-cell table:style-name="ce5"/>
          <table:table-cell table:style-name="ce33" table:formula="of:=[.D44]-[.D45]" office:value-type="float" office:value="41500" calcext:value-type="float">
            <text:p>41500.0</text:p>
          </table:table-cell>
          <table:table-cell table:style-name="ce33" table:formula="of:=[.E44]-[.E45]" office:value-type="float" office:value="53120" calcext:value-type="float">
            <text:p>53120.0</text:p>
          </table:table-cell>
          <table:table-cell table:style-name="ce33" table:formula="of:=[.F44]-[.F45]" office:value-type="float" office:value="56606" calcext:value-type="float">
            <text:p>56606.0</text:p>
          </table:table-cell>
          <table:table-cell table:style-name="ce33" table:formula="of:=[.G44]-[.G45]" office:value-type="float" office:value="68737.28" calcext:value-type="float">
            <text:p>68737.3</text:p>
          </table:table-cell>
          <table:table-cell table:style-name="ce33" table:formula="of:=[.H44]-[.H45]" office:value-type="float" office:value="70444.0256" calcext:value-type="float">
            <text:p>70444.0</text:p>
          </table:table-cell>
          <table:table-cell table:style-name="ce33" table:formula="of:=[.I44]-[.I45]" office:value-type="float" office:value="72184.906112" calcext:value-type="float">
            <text:p>72184.9</text:p>
          </table:table-cell>
          <table:table-cell table:style-name="ce33" table:formula="of:=[.J44]-[.J45]" office:value-type="float" office:value="73960.60423424" calcext:value-type="float">
            <text:p>73960.6</text:p>
          </table:table-cell>
          <table:table-cell table:style-name="ce33" table:formula="of:=[.K44]-[.K45]" office:value-type="float" office:value="75771.8163189248" calcext:value-type="float">
            <text:p>75771.8</text:p>
          </table:table-cell>
          <table:table-cell table:style-name="ce33" table:formula="of:=[.L44]-[.L45]" office:value-type="float" office:value="77619.2526453033" calcext:value-type="float">
            <text:p>77619.3</text:p>
          </table:table-cell>
          <table:table-cell table:style-name="ce33" table:formula="of:=[.M44]-[.M45]" office:value-type="float" office:value="79503.6376982094" calcext:value-type="float">
            <text:p>79503.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5. AMORTIZACION DE DEUDA</text:p>
          </table:table-cell>
          <table:covered-table-cell table:number-columns-repeated="9" table:style-name="ce12"/>
          <table:table-cell table:number-columns-repeated="16373"/>
        </table:table-row>
        <table:table-row table:style-name="ro1">
          <table:table-cell/>
          <table:table-cell table:style-name="ce7" office:value-type="string" calcext:value-type="string">
            <text:p>Monto del prestamos</text:p>
          </table:table-cell>
          <table:table-cell table:style-name="ce15" table:formula="of:=[.C14]*60%" office:value-type="float" office:value="228000" calcext:value-type="float">
            <text:p>228000.0</text:p>
          </table:table-cell>
          <table:table-cell office:value-type="string" calcext:value-type="string">
            <text:p>Endeudamiento</text:p>
          </table:table-cell>
          <table:table-cell table:style-name="ce34" office:value-type="percentage" office:value="0.6" calcext:value-type="percentage">
            <text:p>60 %</text:p>
          </table:table-cell>
          <table:table-cell table:number-columns-repeated="16379"/>
        </table:table-row>
        <table:table-row table:style-name="ro1">
          <table:table-cell/>
          <table:table-cell table:style-name="ce7" office:value-type="string" calcext:value-type="string">
            <text:p>TEA</text:p>
          </table:table-cell>
          <table:table-cell table:style-name="ce21" office:value-type="float" office:value="0.09" calcext:value-type="float">
            <text:p>0.09</text:p>
          </table:table-cell>
          <table:table-cell office:value-type="string" calcext:value-type="string">
            <text:p>Fondo propio</text:p>
          </table:table-cell>
          <table:table-cell table:style-name="ce34" office:value-type="percentage" office:value="0.4" calcext:value-type="percentage">
            <text:p>40 %</text:p>
          </table:table-cell>
          <table:table-cell table:number-columns-repeated="16379"/>
        </table:table-row>
        <table:table-row table:style-name="ro1">
          <table:table-cell/>
          <table:table-cell table:style-name="ce7" office:value-type="string" calcext:value-type="string">
            <text:p>n</text:p>
          </table:table-cell>
          <table:table-cell table:style-name="ce15" office:value-type="float" office:value="8" calcext:value-type="float">
            <text:p>8.0</text:p>
          </table:table-cell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>
            <text:p>Pago</text:p>
          </table:table-cell>
          <table:table-cell table:style-name="ce15" table:formula="of:=-PMT([.C50];[.C51];[.C49])" office:value-type="float" office:value="41193.7581469492" calcext:value-type="float">
            <text:p>41193.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ERIOD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Deuda inicial</text:p>
          </table:table-cell>
          <table:table-cell table:style-name="ce20" table:formula="of:=[.C49]" office:value-type="float" office:value="228000" calcext:value-type="float">
            <text:p>228000.00</text:p>
          </table:table-cell>
          <table:table-cell table:style-name="ce20" table:formula="of:=[.C59]" office:value-type="float" office:value="228000" calcext:value-type="float">
            <text:p>228000.00</text:p>
          </table:table-cell>
          <table:table-cell table:style-name="ce20" table:formula="of:=[.D59]" office:value-type="float" office:value="207326.241853051" calcext:value-type="float">
            <text:p>207326.24</text:p>
          </table:table-cell>
          <table:table-cell table:style-name="ce20" table:formula="of:=[.E59]" office:value-type="float" office:value="184791.845472876" calcext:value-type="float">
            <text:p>184791.85</text:p>
          </table:table-cell>
          <table:table-cell table:style-name="ce20" table:formula="of:=[.F59]" office:value-type="float" office:value="160229.353418486" calcext:value-type="float">
            <text:p>160229.35</text:p>
          </table:table-cell>
          <table:table-cell table:style-name="ce20" table:formula="of:=[.G59]" office:value-type="float" office:value="133456.237079201" calcext:value-type="float">
            <text:p>133456.24</text:p>
          </table:table-cell>
          <table:table-cell table:style-name="ce20" table:formula="of:=[.H59]" office:value-type="float" office:value="104273.540269379" calcext:value-type="float">
            <text:p>104273.54</text:p>
          </table:table-cell>
          <table:table-cell table:style-name="ce20" table:formula="of:=[.I59]" office:value-type="float" office:value="72464.4007466744" calcext:value-type="float">
            <text:p>72464.40</text:p>
          </table:table-cell>
          <table:table-cell table:style-name="ce20" table:formula="of:=[.J59]" office:value-type="float" office:value="37792.4386669259" calcext:value-type="float">
            <text:p>37792.44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Interes</text:p>
          </table:table-cell>
          <table:table-cell table:style-name="ce20" office:value-type="float" office:value="0" calcext:value-type="float">
            <text:p>0.00</text:p>
          </table:table-cell>
          <table:table-cell table:style-name="ce20" table:formula="of:=[.D55]*[.$C$50]" office:value-type="float" office:value="20520" calcext:value-type="float">
            <text:p>20520.00</text:p>
          </table:table-cell>
          <table:table-cell table:style-name="ce20" table:formula="of:=[.E55]*[.$C$50]" office:value-type="float" office:value="18659.3617667746" calcext:value-type="float">
            <text:p>18659.36</text:p>
          </table:table-cell>
          <table:table-cell table:style-name="ce20" table:formula="of:=[.F55]*[.$C$50]" office:value-type="float" office:value="16631.2660925589" calcext:value-type="float">
            <text:p>16631.27</text:p>
          </table:table-cell>
          <table:table-cell table:style-name="ce20" table:formula="of:=[.G55]*[.$C$50]" office:value-type="float" office:value="14420.6418076637" calcext:value-type="float">
            <text:p>14420.64</text:p>
          </table:table-cell>
          <table:table-cell table:style-name="ce20" table:formula="of:=[.H55]*[.$C$50]" office:value-type="float" office:value="12011.061337128" calcext:value-type="float">
            <text:p>12011.06</text:p>
          </table:table-cell>
          <table:table-cell table:style-name="ce20" table:formula="of:=[.I55]*[.$C$50]" office:value-type="float" office:value="9384.61862424415" calcext:value-type="float">
            <text:p>9384.62</text:p>
          </table:table-cell>
          <table:table-cell table:style-name="ce20" table:formula="of:=[.J55]*[.$C$50]" office:value-type="float" office:value="6521.79606720069" calcext:value-type="float">
            <text:p>6521.80</text:p>
          </table:table-cell>
          <table:table-cell table:style-name="ce20" table:formula="of:=[.K55]*[.$C$50]" office:value-type="float" office:value="3401.31948002333" calcext:value-type="float">
            <text:p>3401.32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mortizacion del capital</text:p>
          </table:table-cell>
          <table:table-cell table:style-name="ce20" office:value-type="float" office:value="0" calcext:value-type="float">
            <text:p>0.00</text:p>
          </table:table-cell>
          <table:table-cell table:style-name="ce20" table:formula="of:=[.D58]-[.D56]" office:value-type="float" office:value="20673.7581469492" calcext:value-type="float">
            <text:p>20673.76</text:p>
          </table:table-cell>
          <table:table-cell table:style-name="ce20" table:formula="of:=[.E58]-[.E56]" office:value-type="float" office:value="22534.3963801746" calcext:value-type="float">
            <text:p>22534.40</text:p>
          </table:table-cell>
          <table:table-cell table:style-name="ce20" table:formula="of:=[.F58]-[.F56]" office:value-type="float" office:value="24562.4920543903" calcext:value-type="float">
            <text:p>24562.49</text:p>
          </table:table-cell>
          <table:table-cell table:style-name="ce20" table:formula="of:=[.G58]-[.G56]" office:value-type="float" office:value="26773.1163392854" calcext:value-type="float">
            <text:p>26773.12</text:p>
          </table:table-cell>
          <table:table-cell table:style-name="ce20" table:formula="of:=[.H58]-[.H56]" office:value-type="float" office:value="29182.6968098211" calcext:value-type="float">
            <text:p>29182.70</text:p>
          </table:table-cell>
          <table:table-cell table:style-name="ce20" table:formula="of:=[.I58]-[.I56]" office:value-type="float" office:value="31809.139522705" calcext:value-type="float">
            <text:p>31809.14</text:p>
          </table:table-cell>
          <table:table-cell table:style-name="ce20" table:formula="of:=[.J58]-[.J56]" office:value-type="float" office:value="34671.9620797485" calcext:value-type="float">
            <text:p>34671.96</text:p>
          </table:table-cell>
          <table:table-cell table:style-name="ce20" table:formula="of:=[.K58]-[.K56]" office:value-type="float" office:value="37792.4386669258" calcext:value-type="float">
            <text:p>37792.44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Couta</text:p>
          </table:table-cell>
          <table:table-cell table:style-name="ce20" office:value-type="float" office:value="0" calcext:value-type="float">
            <text:p>0.00</text:p>
          </table:table-cell>
          <table:table-cell table:style-name="ce20" table:formula="of:=[.$C$52]" office:value-type="float" office:value="41193.7581469492" calcext:value-type="float">
            <text:p>41193.76</text:p>
          </table:table-cell>
          <table:table-cell table:style-name="ce20" table:formula="of:=[.$C$52]" office:value-type="float" office:value="41193.7581469492" calcext:value-type="float">
            <text:p>41193.76</text:p>
          </table:table-cell>
          <table:table-cell table:style-name="ce20" table:formula="of:=[.$C$52]" office:value-type="float" office:value="41193.7581469492" calcext:value-type="float">
            <text:p>41193.76</text:p>
          </table:table-cell>
          <table:table-cell table:style-name="ce20" table:formula="of:=[.$C$52]" office:value-type="float" office:value="41193.7581469492" calcext:value-type="float">
            <text:p>41193.76</text:p>
          </table:table-cell>
          <table:table-cell table:style-name="ce20" table:formula="of:=[.$C$52]" office:value-type="float" office:value="41193.7581469492" calcext:value-type="float">
            <text:p>41193.76</text:p>
          </table:table-cell>
          <table:table-cell table:style-name="ce20" table:formula="of:=[.$C$52]" office:value-type="float" office:value="41193.7581469492" calcext:value-type="float">
            <text:p>41193.76</text:p>
          </table:table-cell>
          <table:table-cell table:style-name="ce20" table:formula="of:=[.$C$52]" office:value-type="float" office:value="41193.7581469492" calcext:value-type="float">
            <text:p>41193.76</text:p>
          </table:table-cell>
          <table:table-cell table:style-name="ce20" table:formula="of:=[.$C$52]" office:value-type="float" office:value="41193.7581469492" calcext:value-type="float">
            <text:p>41193.76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Deuda final</text:p>
          </table:table-cell>
          <table:table-cell table:style-name="ce20" table:formula="of:=[.C55]" office:value-type="float" office:value="228000" calcext:value-type="float">
            <text:p>228000.00</text:p>
          </table:table-cell>
          <table:table-cell table:style-name="ce20" table:formula="of:=[.D55]-[.D57]" office:value-type="float" office:value="207326.241853051" calcext:value-type="float">
            <text:p>207326.24</text:p>
          </table:table-cell>
          <table:table-cell table:style-name="ce20" table:formula="of:=[.E55]-[.E57]" office:value-type="float" office:value="184791.845472876" calcext:value-type="float">
            <text:p>184791.85</text:p>
          </table:table-cell>
          <table:table-cell table:style-name="ce20" table:formula="of:=[.F55]-[.F57]" office:value-type="float" office:value="160229.353418486" calcext:value-type="float">
            <text:p>160229.35</text:p>
          </table:table-cell>
          <table:table-cell table:style-name="ce20" table:formula="of:=[.G55]-[.G57]" office:value-type="float" office:value="133456.237079201" calcext:value-type="float">
            <text:p>133456.24</text:p>
          </table:table-cell>
          <table:table-cell table:style-name="ce20" table:formula="of:=[.H55]-[.H57]" office:value-type="float" office:value="104273.540269379" calcext:value-type="float">
            <text:p>104273.54</text:p>
          </table:table-cell>
          <table:table-cell table:style-name="ce20" table:formula="of:=[.I55]-[.I57]" office:value-type="float" office:value="72464.4007466744" calcext:value-type="float">
            <text:p>72464.40</text:p>
          </table:table-cell>
          <table:table-cell table:style-name="ce20" table:formula="of:=[.J55]-[.J57]" office:value-type="float" office:value="37792.4386669259" calcext:value-type="float">
            <text:p>37792.44</text:p>
          </table:table-cell>
          <table:table-cell table:style-name="ce36" table:formula="of:=[.K55]-[.K57]" office:value-type="float" office:value="0.0000000000654836185276508" calcext:value-type="float">
            <text:p>0.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12" table:number-rows-spanned="1">
            <text:p>6. FLUJO DE CAJA ECONÓMICO Y FINANCIERO</text:p>
          </table:table-cell>
          <table:covered-table-cell table:number-columns-repeated="11" table:style-name="ce12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2" office:value-type="string" calcext:value-type="string">
            <text:p>Rubro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ctivo Fijo</text:p>
          </table:table-cell>
          <table:table-cell table:style-name="ce22" table:formula="of:=-[.C14]" office:value-type="float" office:value="-380000" calcext:value-type="float">
            <text:p>-380000.0</text:p>
          </table:table-cell>
          <table:table-cell table:style-name="ce22" table:number-columns-repeated="5"/>
          <table:table-cell table:style-name="ce22" table:formula="of:=-[.C13]" office:value-type="float" office:value="-100000" calcext:value-type="float">
            <text:p>-100000.0</text:p>
          </table:table-cell>
          <table:table-cell table:style-name="ce22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apital de trabajo</text:p>
          </table:table-cell>
          <table:table-cell table:style-name="ce22" table:formula="of:=((-[.D40]-[.D41])/2)" office:value-type="float" office:value="-25000" calcext:value-type="float">
            <text:p>-25000.0</text:p>
          </table:table-cell>
          <table:table-cell table:style-name="ce22" table:formula="of:=((-[.E40]-[.E41])/2-[.C65])" office:value-type="float" office:value="-3000" calcext:value-type="float">
            <text:p>-3000.0</text:p>
          </table:table-cell>
          <table:table-cell table:style-name="ce22" table:formula="of:=((-[.F40]-[.F41])/2-[.D65]-[.C65])" office:value-type="float" office:value="-900" calcext:value-type="float">
            <text:p>-900.0</text:p>
          </table:table-cell>
          <table:table-cell table:style-name="ce22" table:formula="of:=((-[.G40]-[.G41])/2-[.E65]-[.D65]-[.C65])" office:value-type="float" office:value="-378" calcext:value-type="float">
            <text:p>-378.0</text:p>
          </table:table-cell>
          <table:table-cell table:style-name="ce22" table:formula="of:=((-[.H40]-[.H41])/2-[.F65]-[.E65]-[.D65]-[.C65])" office:value-type="float" office:value="-385.560000000001" calcext:value-type="float">
            <text:p>-385.6</text:p>
          </table:table-cell>
          <table:table-cell table:style-name="ce22" table:formula="of:=((-[.I40]-[.I41])/2-[.G65]-[.F65]-[.E65]-[.D65]-[.C65])" office:value-type="float" office:value="-393.271199999999" calcext:value-type="float">
            <text:p>-393.3</text:p>
          </table:table-cell>
          <table:table-cell table:style-name="ce22" table:formula="of:=((-[.J40]-[.J41])/2-[.H65]-[.G65]-[.F65]-[.E65]-[.D65]-[.C65])" office:value-type="float" office:value="-401.136624000003" calcext:value-type="float">
            <text:p>-401.1</text:p>
          </table:table-cell>
          <table:table-cell table:style-name="ce22" table:formula="of:=((-[.K40]-[.K41])/2-[.I65]-[.H65]-[.G65]-[.F65]-[.E65]-[.D65]-[.C65])" office:value-type="float" office:value="-409.159356479999" calcext:value-type="float">
            <text:p>-409.2</text:p>
          </table:table-cell>
          <table:table-cell table:style-name="ce22" table:formula="of:=((-[.L40]-[.L41])/2-[.J65]-[.I65]-[.H65]-[.G65]-[.F65]-[.E65]-[.D65]-[.C65])" office:value-type="float" office:value="-417.342543609604" calcext:value-type="float">
            <text:p>-417.3</text:p>
          </table:table-cell>
          <table:table-cell table:style-name="ce22" table:formula="of:=((-[.M40]-[.M41])/2-[.K65]-[.J65]-[.I65]-[.H65]-[.G65]-[.F65]-[.E65]-[.D65]-[.C65])" office:value-type="float" office:value="-425.689394481789" calcext:value-type="float">
            <text:p>-425.7</text:p>
          </table:table-cell>
          <table:table-cell table:style-name="ce22"/>
          <table:table-cell table:number-columns-repeated="1637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greso por ventas de maquinaria</text:p>
          </table:table-cell>
          <table:table-cell table:style-name="ce22" table:number-columns-repeated="6"/>
          <table:table-cell table:style-name="ce22" table:formula="of:=[.C13]/2" office:value-type="float" office:value="50000" calcext:value-type="float">
            <text:p>50000.0</text:p>
          </table:table-cell>
          <table:table-cell table:style-name="ce22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alor recupero Capital de Trabajo</text:p>
          </table:table-cell>
          <table:table-cell/>
          <table:table-cell table:style-name="ce22" table:number-columns-repeated="9"/>
          <table:table-cell table:style-name="ce22" table:formula="of:=-SUM([.C65:.M65])" office:value-type="float" office:value="31710.1591185714" calcext:value-type="float">
            <text:p>31710.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alor de recupero de Terreno</text:p>
          </table:table-cell>
          <table:table-cell table:style-name="ce22" table:number-columns-repeated="10"/>
          <table:table-cell table:style-name="ce22" table:formula="of:=[.C11]" office:value-type="float" office:value="80000" calcext:value-type="float">
            <text:p>80000.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alor de recupero de Activo Fijo (vr)</text:p>
          </table:table-cell>
          <table:table-cell table:style-name="ce22" table:number-columns-repeated="10"/>
          <table:table-cell table:style-name="ce22" table:formula="of:=[.H24]" office:value-type="float" office:value="210000" calcext:value-type="float">
            <text:p>210000.0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lujo de inversion <text:s/>y Liquidación</text:p>
          </table:table-cell>
          <table:table-cell table:style-name="ce23" table:formula="of:=SUM([.C64:.C69])" office:value-type="float" office:value="-405000" calcext:value-type="float">
            <text:p>-405000.0</text:p>
          </table:table-cell>
          <table:table-cell table:style-name="ce23" table:formula="of:=SUM([.D64:.D69])" office:value-type="float" office:value="-3000" calcext:value-type="float">
            <text:p>-3000.0</text:p>
          </table:table-cell>
          <table:table-cell table:style-name="ce23" table:formula="of:=SUM([.E64:.E69])" office:value-type="float" office:value="-900" calcext:value-type="float">
            <text:p>-900.0</text:p>
          </table:table-cell>
          <table:table-cell table:style-name="ce23" table:formula="of:=SUM([.F64:.F69])" office:value-type="float" office:value="-378" calcext:value-type="float">
            <text:p>-378.0</text:p>
          </table:table-cell>
          <table:table-cell table:style-name="ce23" table:formula="of:=SUM([.G64:.G69])" office:value-type="float" office:value="-385.560000000001" calcext:value-type="float">
            <text:p>-385.6</text:p>
          </table:table-cell>
          <table:table-cell table:style-name="ce23" table:formula="of:=SUM([.H64:.H69])" office:value-type="float" office:value="-393.271199999999" calcext:value-type="float">
            <text:p>-393.3</text:p>
          </table:table-cell>
          <table:table-cell table:style-name="ce23" table:formula="of:=SUM([.I64:.I69])" office:value-type="float" office:value="-50401.136624" calcext:value-type="float">
            <text:p>-50401.1</text:p>
          </table:table-cell>
          <table:table-cell table:style-name="ce23" table:formula="of:=SUM([.J64:.J69])" office:value-type="float" office:value="-409.159356479999" calcext:value-type="float">
            <text:p>-409.2</text:p>
          </table:table-cell>
          <table:table-cell table:style-name="ce23" table:formula="of:=SUM([.K64:.K69])" office:value-type="float" office:value="-417.342543609604" calcext:value-type="float">
            <text:p>-417.3</text:p>
          </table:table-cell>
          <table:table-cell table:style-name="ce23" table:formula="of:=SUM([.L64:.L69])" office:value-type="float" office:value="-425.689394481789" calcext:value-type="float">
            <text:p>-425.7</text:p>
          </table:table-cell>
          <table:table-cell table:style-name="ce23" table:formula="of:=SUM([.M64:.M69])" office:value-type="float" office:value="321710.159118571" calcext:value-type="float">
            <text:p>321710.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greso en efectivo</text:p>
          </table:table-cell>
          <table:table-cell table:style-name="ce22"/>
          <table:table-cell table:style-name="ce22" table:formula="of:=[.D28]" office:value-type="float" office:value="100000" calcext:value-type="float">
            <text:p>100000.0</text:p>
          </table:table-cell>
          <table:table-cell table:style-name="ce22" table:formula="of:=[.E28]" office:value-type="float" office:value="120000" calcext:value-type="float">
            <text:p>120000.0</text:p>
          </table:table-cell>
          <table:table-cell table:style-name="ce22" table:formula="of:=[.F28]" office:value-type="float" office:value="126000" calcext:value-type="float">
            <text:p>126000.0</text:p>
          </table:table-cell>
          <table:table-cell table:style-name="ce22" table:formula="of:=[.G28]" office:value-type="float" office:value="141372" calcext:value-type="float">
            <text:p>141372.0</text:p>
          </table:table-cell>
          <table:table-cell table:style-name="ce22" table:formula="of:=[.H28]" office:value-type="float" office:value="144199.44" calcext:value-type="float">
            <text:p>144199.4</text:p>
          </table:table-cell>
          <table:table-cell table:style-name="ce22" table:formula="of:=[.I28]" office:value-type="float" office:value="147083.4288" calcext:value-type="float">
            <text:p>147083.4</text:p>
          </table:table-cell>
          <table:table-cell table:style-name="ce22" table:formula="of:=[.J28]" office:value-type="float" office:value="150025.097376" calcext:value-type="float">
            <text:p>150025.1</text:p>
          </table:table-cell>
          <table:table-cell table:style-name="ce22" table:formula="of:=[.K28]" office:value-type="float" office:value="153025.59932352" calcext:value-type="float">
            <text:p>153025.6</text:p>
          </table:table-cell>
          <table:table-cell table:style-name="ce22" table:formula="of:=[.L28]" office:value-type="float" office:value="156086.11130999" calcext:value-type="float">
            <text:p>156086.1</text:p>
          </table:table-cell>
          <table:table-cell table:style-name="ce22" table:formula="of:=[.M28]" office:value-type="float" office:value="159207.83353619" calcext:value-type="float">
            <text:p>159207.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stos fijos</text:p>
          </table:table-cell>
          <table:table-cell table:style-name="ce22"/>
          <table:table-cell table:style-name="ce22" table:formula="of:=-[.D30]" office:value-type="float" office:value="-20000" calcext:value-type="float">
            <text:p>-20000.0</text:p>
          </table:table-cell>
          <table:table-cell table:style-name="ce22" table:formula="of:=-[.E30]" office:value-type="float" office:value="-20000" calcext:value-type="float">
            <text:p>-20000.0</text:p>
          </table:table-cell>
          <table:table-cell table:style-name="ce22" table:formula="of:=-[.F30]" office:value-type="float" office:value="-20000" calcext:value-type="float">
            <text:p>-20000.0</text:p>
          </table:table-cell>
          <table:table-cell table:style-name="ce22" table:formula="of:=-[.G30]" office:value-type="float" office:value="-20000" calcext:value-type="float">
            <text:p>-20000.0</text:p>
          </table:table-cell>
          <table:table-cell table:style-name="ce22" table:formula="of:=-[.H30]" office:value-type="float" office:value="-20000" calcext:value-type="float">
            <text:p>-20000.0</text:p>
          </table:table-cell>
          <table:table-cell table:style-name="ce22" table:formula="of:=-[.I30]" office:value-type="float" office:value="-20000" calcext:value-type="float">
            <text:p>-20000.0</text:p>
          </table:table-cell>
          <table:table-cell table:style-name="ce22" table:formula="of:=-[.J30]" office:value-type="float" office:value="-20000" calcext:value-type="float">
            <text:p>-20000.0</text:p>
          </table:table-cell>
          <table:table-cell table:style-name="ce22" table:formula="of:=-[.K30]" office:value-type="float" office:value="-20000" calcext:value-type="float">
            <text:p>-20000.0</text:p>
          </table:table-cell>
          <table:table-cell table:style-name="ce22" table:formula="of:=-[.L30]" office:value-type="float" office:value="-20000" calcext:value-type="float">
            <text:p>-20000.0</text:p>
          </table:table-cell>
          <table:table-cell table:style-name="ce22" table:formula="of:=-[.M30]" office:value-type="float" office:value="-20000" calcext:value-type="float">
            <text:p>-20000.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stos variables</text:p>
          </table:table-cell>
          <table:table-cell table:style-name="ce22"/>
          <table:table-cell table:style-name="ce22" table:formula="of:=-[.D29]" office:value-type="float" office:value="-30000" calcext:value-type="float">
            <text:p>-30000.0</text:p>
          </table:table-cell>
          <table:table-cell table:style-name="ce22" table:formula="of:=-[.E29]" office:value-type="float" office:value="-36000" calcext:value-type="float">
            <text:p>-36000.0</text:p>
          </table:table-cell>
          <table:table-cell table:style-name="ce22" table:formula="of:=-[.F29]" office:value-type="float" office:value="-37800" calcext:value-type="float">
            <text:p>-37800.0</text:p>
          </table:table-cell>
          <table:table-cell table:style-name="ce22" table:formula="of:=-[.G29]" office:value-type="float" office:value="-38556" calcext:value-type="float">
            <text:p>-38556.0</text:p>
          </table:table-cell>
          <table:table-cell table:style-name="ce22" table:formula="of:=-[.H29]" office:value-type="float" office:value="-39327.12" calcext:value-type="float">
            <text:p>-39327.1</text:p>
          </table:table-cell>
          <table:table-cell table:style-name="ce22" table:formula="of:=-[.I29]" office:value-type="float" office:value="-40113.6624" calcext:value-type="float">
            <text:p>-40113.7</text:p>
          </table:table-cell>
          <table:table-cell table:style-name="ce22" table:formula="of:=-[.J29]" office:value-type="float" office:value="-40915.935648" calcext:value-type="float">
            <text:p>-40915.9</text:p>
          </table:table-cell>
          <table:table-cell table:style-name="ce22" table:formula="of:=-[.K29]" office:value-type="float" office:value="-41734.25436096" calcext:value-type="float">
            <text:p>-41734.3</text:p>
          </table:table-cell>
          <table:table-cell table:style-name="ce22" table:formula="of:=-[.L29]" office:value-type="float" office:value="-42568.9394481792" calcext:value-type="float">
            <text:p>-42568.9</text:p>
          </table:table-cell>
          <table:table-cell table:style-name="ce22" table:formula="of:=-[.M29]" office:value-type="float" office:value="-43420.3182371428" calcext:value-type="float">
            <text:p>-43420.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mpuestos y tibutos</text:p>
          </table:table-cell>
          <table:table-cell table:style-name="ce22"/>
          <table:table-cell table:style-name="ce22" table:formula="of:=-[.D34]" office:value-type="float" office:value="-5950" calcext:value-type="float">
            <text:p>-5950.0</text:p>
          </table:table-cell>
          <table:table-cell table:style-name="ce22" table:formula="of:=-[.E34]" office:value-type="float" office:value="-8330" calcext:value-type="float">
            <text:p>-8330.0</text:p>
          </table:table-cell>
          <table:table-cell table:style-name="ce22" table:formula="of:=-[.F34]" office:value-type="float" office:value="-9044" calcext:value-type="float">
            <text:p>-9044.0</text:p>
          </table:table-cell>
          <table:table-cell table:style-name="ce22" table:formula="of:=-[.G34]" office:value-type="float" office:value="-11528.72" calcext:value-type="float">
            <text:p>-11528.7</text:p>
          </table:table-cell>
          <table:table-cell table:style-name="ce22" table:formula="of:=-[.H34]" office:value-type="float" office:value="-11878.2944" calcext:value-type="float">
            <text:p>-11878.3</text:p>
          </table:table-cell>
          <table:table-cell table:style-name="ce22" table:formula="of:=-[.I34]" office:value-type="float" office:value="-12234.860288" calcext:value-type="float">
            <text:p>-12234.9</text:p>
          </table:table-cell>
          <table:table-cell table:style-name="ce22" table:formula="of:=-[.J34]" office:value-type="float" office:value="-12598.55749376" calcext:value-type="float">
            <text:p>-12598.6</text:p>
          </table:table-cell>
          <table:table-cell table:style-name="ce22" table:formula="of:=-[.K34]" office:value-type="float" office:value="-12969.5286436352" calcext:value-type="float">
            <text:p>-12969.5</text:p>
          </table:table-cell>
          <table:table-cell table:style-name="ce22" table:formula="of:=-[.L34]" office:value-type="float" office:value="-13347.9192165079" calcext:value-type="float">
            <text:p>-13347.9</text:p>
          </table:table-cell>
          <table:table-cell table:style-name="ce22" table:formula="of:=-[.M34]" office:value-type="float" office:value="-13733.8776008381" calcext:value-type="float">
            <text:p>-13733.9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lujo de caja operativo</text:p>
          </table:table-cell>
          <table:table-cell table:style-name="ce23"/>
          <table:table-cell table:style-name="ce23" table:formula="of:=SUM([.D71:.D74])" office:value-type="float" office:value="44050" calcext:value-type="float">
            <text:p>44050.0</text:p>
          </table:table-cell>
          <table:table-cell table:style-name="ce23" table:formula="of:=SUM([.E71:.E74])" office:value-type="float" office:value="55670" calcext:value-type="float">
            <text:p>55670.0</text:p>
          </table:table-cell>
          <table:table-cell table:style-name="ce23" table:formula="of:=SUM([.F71:.F74])" office:value-type="float" office:value="59156" calcext:value-type="float">
            <text:p>59156.0</text:p>
          </table:table-cell>
          <table:table-cell table:style-name="ce23" table:formula="of:=SUM([.G71:.G74])" office:value-type="float" office:value="71287.28" calcext:value-type="float">
            <text:p>71287.3</text:p>
          </table:table-cell>
          <table:table-cell table:style-name="ce23" table:formula="of:=SUM([.H71:.H74])" office:value-type="float" office:value="72994.0256" calcext:value-type="float">
            <text:p>72994.0</text:p>
          </table:table-cell>
          <table:table-cell table:style-name="ce23" table:formula="of:=SUM([.I71:.I74])" office:value-type="float" office:value="74734.906112" calcext:value-type="float">
            <text:p>74734.9</text:p>
          </table:table-cell>
          <table:table-cell table:style-name="ce23" table:formula="of:=SUM([.J71:.J74])" office:value-type="float" office:value="76510.60423424" calcext:value-type="float">
            <text:p>76510.6</text:p>
          </table:table-cell>
          <table:table-cell table:style-name="ce23" table:formula="of:=SUM([.K71:.K74])" office:value-type="float" office:value="78321.8163189248" calcext:value-type="float">
            <text:p>78321.8</text:p>
          </table:table-cell>
          <table:table-cell table:style-name="ce23" table:formula="of:=SUM([.L71:.L74])" office:value-type="float" office:value="80169.2526453033" calcext:value-type="float">
            <text:p>80169.3</text:p>
          </table:table-cell>
          <table:table-cell table:style-name="ce23" table:formula="of:=SUM([.M71:.M74])" office:value-type="float" office:value="82053.6376982094" calcext:value-type="float">
            <text:p>82053.6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FLUJO DE CAJA ECONOMICO (FCE)</text:p>
          </table:table-cell>
          <table:table-cell table:style-name="ce24" table:formula="of:=[.C70]+[.C75]" office:value-type="float" office:value="-405000" calcext:value-type="float">
            <text:p>-405000.0</text:p>
          </table:table-cell>
          <table:table-cell table:style-name="ce24" table:formula="of:=[.D70]+[.D75]" office:value-type="float" office:value="41050" calcext:value-type="float">
            <text:p>41050.0</text:p>
          </table:table-cell>
          <table:table-cell table:style-name="ce24" table:formula="of:=[.E70]+[.E75]" office:value-type="float" office:value="54770" calcext:value-type="float">
            <text:p>54770.0</text:p>
          </table:table-cell>
          <table:table-cell table:style-name="ce24" table:formula="of:=[.F70]+[.F75]" office:value-type="float" office:value="58778" calcext:value-type="float">
            <text:p>58778.0</text:p>
          </table:table-cell>
          <table:table-cell table:style-name="ce24" table:formula="of:=[.G70]+[.G75]" office:value-type="float" office:value="70901.72" calcext:value-type="float">
            <text:p>70901.7</text:p>
          </table:table-cell>
          <table:table-cell table:style-name="ce24" table:formula="of:=[.H70]+[.H75]" office:value-type="float" office:value="72600.7544" calcext:value-type="float">
            <text:p>72600.8</text:p>
          </table:table-cell>
          <table:table-cell table:style-name="ce24" table:formula="of:=[.I70]+[.I75]" office:value-type="float" office:value="24333.769488" calcext:value-type="float">
            <text:p>24333.8</text:p>
          </table:table-cell>
          <table:table-cell table:style-name="ce24" table:formula="of:=[.J70]+[.J75]" office:value-type="float" office:value="76101.44487776" calcext:value-type="float">
            <text:p>76101.4</text:p>
          </table:table-cell>
          <table:table-cell table:style-name="ce24" table:formula="of:=[.K70]+[.K75]" office:value-type="float" office:value="77904.4737753152" calcext:value-type="float">
            <text:p>77904.5</text:p>
          </table:table-cell>
          <table:table-cell table:style-name="ce24" table:formula="of:=[.L70]+[.L75]" office:value-type="float" office:value="79743.5632508215" calcext:value-type="float">
            <text:p>79743.6</text:p>
          </table:table-cell>
          <table:table-cell table:style-name="ce24" table:formula="of:=[.M70]+[.M75]" office:value-type="float" office:value="403763.796816781" calcext:value-type="float">
            <text:p>403763.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inanciamiento Ne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Prestamos</text:p>
          </table:table-cell>
          <table:table-cell table:style-name="ce25" table:formula="of:=[.C49]" office:value-type="float" office:value="228000" calcext:value-type="float">
            <text:p>228000.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apital</text:p>
          </table:table-cell>
          <table:table-cell/>
          <table:table-cell table:style-name="ce20" table:formula="of:=-[.D57]" office:value-type="float" office:value="-20673.7581469492" calcext:value-type="float">
            <text:p>-20673.76</text:p>
          </table:table-cell>
          <table:table-cell table:style-name="ce20" table:formula="of:=-[.E57]" office:value-type="float" office:value="-22534.3963801746" calcext:value-type="float">
            <text:p>-22534.40</text:p>
          </table:table-cell>
          <table:table-cell table:style-name="ce20" table:formula="of:=-[.F57]" office:value-type="float" office:value="-24562.4920543903" calcext:value-type="float">
            <text:p>-24562.49</text:p>
          </table:table-cell>
          <table:table-cell table:style-name="ce20" table:formula="of:=-[.G57]" office:value-type="float" office:value="-26773.1163392854" calcext:value-type="float">
            <text:p>-26773.12</text:p>
          </table:table-cell>
          <table:table-cell table:style-name="ce20" table:formula="of:=-[.H57]" office:value-type="float" office:value="-29182.6968098211" calcext:value-type="float">
            <text:p>-29182.70</text:p>
          </table:table-cell>
          <table:table-cell table:style-name="ce20" table:formula="of:=-[.I57]" office:value-type="float" office:value="-31809.139522705" calcext:value-type="float">
            <text:p>-31809.14</text:p>
          </table:table-cell>
          <table:table-cell table:style-name="ce20" table:formula="of:=-[.J57]" office:value-type="float" office:value="-34671.9620797485" calcext:value-type="float">
            <text:p>-34671.96</text:p>
          </table:table-cell>
          <table:table-cell table:style-name="ce20" table:formula="of:=-[.K57]" office:value-type="float" office:value="-37792.4386669258" calcext:value-type="float">
            <text:p>-37792.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tereses</text:p>
          </table:table-cell>
          <table:table-cell/>
          <table:table-cell table:style-name="ce20" table:formula="of:=-[.D56]" office:value-type="float" office:value="-20520" calcext:value-type="float">
            <text:p>-20520.00</text:p>
          </table:table-cell>
          <table:table-cell table:style-name="ce20" table:formula="of:=-[.E56]" office:value-type="float" office:value="-18659.3617667746" calcext:value-type="float">
            <text:p>-18659.36</text:p>
          </table:table-cell>
          <table:table-cell table:style-name="ce20" table:formula="of:=-[.F56]" office:value-type="float" office:value="-16631.2660925589" calcext:value-type="float">
            <text:p>-16631.27</text:p>
          </table:table-cell>
          <table:table-cell table:style-name="ce20" table:formula="of:=-[.G56]" office:value-type="float" office:value="-14420.6418076637" calcext:value-type="float">
            <text:p>-14420.64</text:p>
          </table:table-cell>
          <table:table-cell table:style-name="ce20" table:formula="of:=-[.H56]" office:value-type="float" office:value="-12011.061337128" calcext:value-type="float">
            <text:p>-12011.06</text:p>
          </table:table-cell>
          <table:table-cell table:style-name="ce20" table:formula="of:=-[.I56]" office:value-type="float" office:value="-9384.61862424415" calcext:value-type="float">
            <text:p>-9384.62</text:p>
          </table:table-cell>
          <table:table-cell table:style-name="ce20" table:formula="of:=-[.J56]" office:value-type="float" office:value="-6521.79606720069" calcext:value-type="float">
            <text:p>-6521.80</text:p>
          </table:table-cell>
          <table:table-cell table:style-name="ce20" table:formula="of:=-[.K56]" office:value-type="float" office:value="-3401.31948002333" calcext:value-type="float">
            <text:p>-3401.3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Escudo Fiscal o tributario</text:p>
          </table:table-cell>
          <table:table-cell/>
          <table:table-cell table:formula="of:=-17%*[.D81]" office:value-type="float" office:value="3488.4" calcext:value-type="float">
            <text:p>3488.4</text:p>
          </table:table-cell>
          <table:table-cell table:formula="of:=-17%*[.E81]" office:value-type="float" office:value="3172.09150035168" calcext:value-type="float">
            <text:p>3172.09150035168</text:p>
          </table:table-cell>
          <table:table-cell table:formula="of:=-17%*[.F81]" office:value-type="float" office:value="2827.31523573501" calcext:value-type="float">
            <text:p>2827.31523573501</text:p>
          </table:table-cell>
          <table:table-cell table:formula="of:=-17%*[.G81]" office:value-type="float" office:value="2451.50910730283" calcext:value-type="float">
            <text:p>2451.50910730283</text:p>
          </table:table-cell>
          <table:table-cell table:formula="of:=-17%*[.H81]" office:value-type="float" office:value="2041.88042731176" calcext:value-type="float">
            <text:p>2041.88042731176</text:p>
          </table:table-cell>
          <table:table-cell table:formula="of:=-17%*[.I81]" office:value-type="float" office:value="1595.38516612151" calcext:value-type="float">
            <text:p>1595.38516612151</text:p>
          </table:table-cell>
          <table:table-cell table:formula="of:=-17%*[.J81]" office:value-type="float" office:value="1108.70533142412" calcext:value-type="float">
            <text:p>1108.70533142412</text:p>
          </table:table-cell>
          <table:table-cell table:formula="of:=-17%*[.K81]" office:value-type="float" office:value="578.224311603966" calcext:value-type="float">
            <text:p>578.224311603966</text:p>
          </table:table-cell>
          <table:table-cell table:number-columns-repeated="16373"/>
        </table:table-row>
        <table:table-row table:style-name="ro1">
          <table:table-cell/>
          <table:table-cell table:style-name="ce8" office:value-type="string" calcext:value-type="string">
            <text:p>FLUJO DE CAJA DE DEUDA</text:p>
          </table:table-cell>
          <table:table-cell table:style-name="ce26" table:formula="of:=SUM([.C79:.C82])" office:value-type="float" office:value="228000" calcext:value-type="float">
            <text:p>228000.0</text:p>
          </table:table-cell>
          <table:table-cell table:style-name="ce26" table:formula="of:=SUM([.D79:.D82])" office:value-type="float" office:value="-37705.3581469492" calcext:value-type="float">
            <text:p>-37705.4</text:p>
          </table:table-cell>
          <table:table-cell table:style-name="ce26" table:formula="of:=SUM([.E79:.E82])" office:value-type="float" office:value="-38021.6666465975" calcext:value-type="float">
            <text:p>-38021.7</text:p>
          </table:table-cell>
          <table:table-cell table:style-name="ce26" table:formula="of:=SUM([.F79:.F82])" office:value-type="float" office:value="-38366.4429112142" calcext:value-type="float">
            <text:p>-38366.4</text:p>
          </table:table-cell>
          <table:table-cell table:style-name="ce26" table:formula="of:=SUM([.G79:.G82])" office:value-type="float" office:value="-38742.2490396463" calcext:value-type="float">
            <text:p>-38742.2</text:p>
          </table:table-cell>
          <table:table-cell table:style-name="ce26" table:formula="of:=SUM([.H79:.H82])" office:value-type="float" office:value="-39151.8777196374" calcext:value-type="float">
            <text:p>-39151.9</text:p>
          </table:table-cell>
          <table:table-cell table:style-name="ce26" table:formula="of:=SUM([.I79:.I82])" office:value-type="float" office:value="-39598.3729808277" calcext:value-type="float">
            <text:p>-39598.4</text:p>
          </table:table-cell>
          <table:table-cell table:style-name="ce26" table:formula="of:=SUM([.J79:.J82])" office:value-type="float" office:value="-40085.052815525" calcext:value-type="float">
            <text:p>-40085.1</text:p>
          </table:table-cell>
          <table:table-cell table:style-name="ce26" table:formula="of:=SUM([.K79:.K82])" office:value-type="float" office:value="-40615.5338353452" calcext:value-type="float">
            <text:p>-40615.5</text:p>
          </table:table-cell>
          <table:table-cell table:style-name="ce26" table:formula="of:=SUM([.L79:.L82])" office:value-type="float" office:value="0" calcext:value-type="float">
            <text:p>0.0</text:p>
          </table:table-cell>
          <table:table-cell table:style-name="ce26" table:formula="of:=SUM([.M79:.M82])" office:value-type="float" office:value="0" calcext:value-type="float">
            <text:p>0.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FLUJO DE CAJA FINACIERO</text:p>
          </table:table-cell>
          <table:table-cell table:style-name="ce27" table:formula="of:=[.C76]+[.C83]" office:value-type="float" office:value="-177000" calcext:value-type="float">
            <text:p>-177000.0</text:p>
          </table:table-cell>
          <table:table-cell table:style-name="ce27" table:formula="of:=[.D76]+[.D83]" office:value-type="float" office:value="3344.64185305084" calcext:value-type="float">
            <text:p>3344.6</text:p>
          </table:table-cell>
          <table:table-cell table:style-name="ce27" table:formula="of:=[.E76]+[.E83]" office:value-type="float" office:value="16748.3333534025" calcext:value-type="float">
            <text:p>16748.3</text:p>
          </table:table-cell>
          <table:table-cell table:style-name="ce27" table:formula="of:=[.F76]+[.F83]" office:value-type="float" office:value="20411.5570887858" calcext:value-type="float">
            <text:p>20411.6</text:p>
          </table:table-cell>
          <table:table-cell table:style-name="ce27" table:formula="of:=[.G76]+[.G83]" office:value-type="float" office:value="32159.4709603537" calcext:value-type="float">
            <text:p>32159.5</text:p>
          </table:table-cell>
          <table:table-cell table:style-name="ce27" table:formula="of:=[.H76]+[.H83]" office:value-type="float" office:value="33448.8766803626" calcext:value-type="float">
            <text:p>33448.9</text:p>
          </table:table-cell>
          <table:table-cell table:style-name="ce27" table:formula="of:=[.I76]+[.I83]" office:value-type="float" office:value="-15264.6034928277" calcext:value-type="float">
            <text:p>-15264.6</text:p>
          </table:table-cell>
          <table:table-cell table:style-name="ce27" table:formula="of:=[.J76]+[.J83]" office:value-type="float" office:value="36016.392062235" calcext:value-type="float">
            <text:p>36016.4</text:p>
          </table:table-cell>
          <table:table-cell table:style-name="ce27" table:formula="of:=[.K76]+[.K83]" office:value-type="float" office:value="37288.93993997" calcext:value-type="float">
            <text:p>37288.9</text:p>
          </table:table-cell>
          <table:table-cell table:style-name="ce27" table:formula="of:=[.L76]+[.L83]" office:value-type="float" office:value="79743.5632508215" calcext:value-type="float">
            <text:p>79743.6</text:p>
          </table:table-cell>
          <table:table-cell table:style-name="ce27" table:formula="of:=[.M76]+[.M83]" office:value-type="float" office:value="403763.796816781" calcext:value-type="float">
            <text:p>403763.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K: COSTO DE OPOTUNIDAD DE CAPITAL</text:p>
          </table:table-cell>
          <table:table-cell office:value-type="string" calcext:value-type="string">
            <text:p>(Es el mínima rentabilidad que exige el inversionista por su participación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WACC: <text:s/>COSTO MEDIO PONDERADO DEL CAPITA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PROYECTO A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ROYECTO B (De nosotros)</text:p>
          </table:table-cell>
          <table:table-cell/>
          <table:table-cell table:style-name="ce19" office:value-type="string" calcext:value-type="string">
            <text:p>10 +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COK</text:p>
          </table:table-cell>
          <table:table-cell table:number-columns-repeated="16382"/>
        </table:table-row>
        <table:table-row table:style-name="ro1">
          <table:table-cell/>
          <table:table-cell table:style-name="ce10" office:value-type="string" calcext:value-type="string">
            <text:p>COK=Rf+B*(Em-Rf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f: Tasa Libre de Riesgo</text:p>
          </table:table-cell>
          <table:table-cell table:style-name="ce28" office:value-type="percentage" office:value="0.01767" calcext:value-type="percentage">
            <text:p>1.77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m: Rendimiento de mercado</text:p>
          </table:table-cell>
          <table:table-cell table:style-name="ce28" office:value-type="percentage" office:value="0.0481" calcext:value-type="percentage">
            <text:p>4.81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: Beta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COK=</text:p>
          </table:table-cell>
          <table:table-cell table:style-name="ce29" table:formula="of:=[.C95]+[.C97]*([.C96]-[.C95])" office:value-type="percentage" office:value="0.032885" calcext:value-type="percentage">
            <text:p>3.29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WACC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WACC=Ke*(E/(E+D))+Kd*(1-T)*(D/(E+D)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e: COK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: Fondo propio (Capital propio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: Endeudamient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d: Costo Financier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: Impuest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WACC=</text:p>
          </table:table-cell>
          <table:table-cell table:style-name="ce29" table:formula="of:=[.C99]*([.E50]/([.E50]+[.E49])+[.C50]*(1-17%)*([.E49]/([.E50]+[.E49])))" office:value-type="percentage" office:value="0.0146279057" calcext:value-type="percentage">
            <text:p>1.46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INDICADORES DE EVUALUACIÓN DEL PROYECTO</text:p>
          </table:table-cell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>
            <text:p>VANE</text:p>
          </table:table-cell>
          <table:table-cell table:style-name="ce30" table:formula="of:=NPV([.C99];[.D76:.M76])+[.C76]" office:value-type="float" office:value="356076.486585364" calcext:value-type="float">
            <text:p>$356,076.49 </text:p>
          </table:table-cell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>
            <text:p>TIRE</text:p>
          </table:table-cell>
          <table:table-cell table:style-name="ce31" table:formula="of:=IRR([.C76:.M76])" office:value-type="percentage" office:value="0.137536181568038" calcext:value-type="percentage">
            <text:p>14 %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Si VAN&gt;0: El valor actualizado de los cobros y pagos futuros de la inversion, a la tasa de descuento elegida generará beneficios.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i VAN=0: El proyecto de inversion no generará ni beneficios ni perdidas, siemdo su relización, en principio, indiferente.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i VAN&lt;0: El proyecto de inversion generará pérdidas, por lo que deberá ser rechazad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i TIR &gt; WACC entonces se rechaza el proyecto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i TIR &lt; WACC entonces se aprueba el proyecto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/. </number:text>
      <number:number number:decimal-places="2" number:min-decimal-places="2" number:min-integer-digits="1" number:grouping="true"/>
    </number:number-style>
    <number:number-style style:name="N118">
      <number:text>S/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/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0P2" style:volatile="true">
      <number:text loext:blank-width-char=" "> </number:text>
      <number:fill-character> </number:fill-character>
      <number:text>- _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S/. </number:text>
      <number:fill-character> </number:fill-character>
      <number:text>- _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2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2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04:20:15.5853455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CE" style:display-name="PageStyle_F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. Edison Achalma Mendoza</meta:initial-creator>
    <dc:creator>crossover</dc:creator>
    <meta:creation-date>2015-06-05T18:17:20</meta:creation-date>
    <dc:date>2022-10-31T00:35:51</dc:date>
    <meta:generator>LibreOffice/24.8.3.2$Linux_X86_64 LibreOffice_project/480$Build-2</meta:generator>
    <meta:document-statistic meta:table-count="1" meta:cell-count="556" meta:object-count="0"/>
    <meta:user-defined meta:name="AppVersion">16.0300</meta:user-defined>
  </office:meta>
</office:document-meta>
</file>