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6.518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1f4e7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1f4e7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ackground-color="#1f4e79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529cm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17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&lt;0" style:apply-style-name="ConditionalStyle_5f_7" style:base-cell-address="Sheet1.D72"/>
      <style:map style:condition="cell-content()&gt;0" style:apply-style-name="ConditionalStyle_5f_6" style:base-cell-address="Sheet1.D72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gt;0" style:apply-style-name="ConditionalStyle_5f_2" style:base-cell-address="Sheet1.D84"/>
      <style:map style:condition="cell-content()&lt;0" style:apply-style-name="ConditionalStyle_5f_1" style:base-cell-address="Sheet1.D84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OLUCIÓN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DATO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ctivo Fijo</text:p>
          </table:table-cell>
          <table:table-cell table:style-name="ce17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style-name="ce17" office:value-type="float" office:value="20000" calcext:value-type="float">
            <text:p>2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ida útil 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año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ntidad de ventas Año1</text:p>
          </table:table-cell>
          <table:table-cell table:style-name="ce17" office:value-type="float" office:value="10000" calcext:value-type="float">
            <text:p>10000</text:p>
          </table:table-cell>
          <table:table-cell office:value-type="string" calcext:value-type="string">
            <text:p>unidad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ecio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asa de crecimiento</text:p>
          </table:table-cell>
          <table:table-cell table:style-name="ce18" office:value-type="percentage" office:value="0.08" calcext:value-type="percentage">
            <text:p>8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teria prima</text:p>
          </table:table-cell>
          <table:table-cell table:style-name="ce17" office:value-type="float" office:value="1.2" calcext:value-type="float">
            <text:p>1.2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o de obra</text:p>
          </table:table-cell>
          <table:table-cell table:style-name="ce17" office:value-type="float" office:value="0.6" calcext:value-type="float">
            <text:p>0.6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stos fijos</text:p>
          </table:table-cell>
          <table:table-cell table:style-name="ce17" office:value-type="float" office:value="45000" calcext:value-type="float">
            <text:p>45000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sto variable unitario</text:p>
          </table:table-cell>
          <table:table-cell table:style-name="ce17" table:formula="of:=[.C11]++[.C12]" office:value-type="float" office:value="1.8" calcext:value-type="float">
            <text:p>1.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asa de impuesto</text:p>
          </table:table-cell>
          <table:table-cell table:style-name="ce19" office:value-type="percentage" office:value="0.295" calcext:value-type="percentage">
            <text:p>29.50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K=ku</text:p>
          </table:table-cell>
          <table:table-cell table:style-name="ce18" office:value-type="percentage" office:value="0.1" calcext:value-type="percentage">
            <text:p>10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ESTADO DE RESULTADOS</text:p>
          </table:table-cell>
          <table:covered-table-cell table:number-columns-repeated="5" table:style-name="ce20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RUBRO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INGRESOS</text:p>
          </table:table-cell>
          <table:table-cell table:style-name="ce5" table:formula="of:=[.C21]*[.C22]" office:value-type="float" office:value="90000" calcext:value-type="float">
            <text:p>90000</text:p>
          </table:table-cell>
          <table:table-cell table:style-name="ce5" table:formula="of:=[.D21]*[.D22]" office:value-type="float" office:value="97200" calcext:value-type="float">
            <text:p>97200</text:p>
          </table:table-cell>
          <table:table-cell table:style-name="ce5" table:formula="of:=[.E21]*[.E22]" office:value-type="float" office:value="104976" calcext:value-type="float">
            <text:p>104976</text:p>
          </table:table-cell>
          <table:table-cell table:style-name="ce5" table:formula="of:=[.F21]*[.F22]" office:value-type="float" office:value="113374.08" calcext:value-type="float">
            <text:p>113374.08</text:p>
          </table:table-cell>
          <table:table-cell table:style-name="ce5" table:formula="of:=[.G21]*[.G22]" office:value-type="float" office:value="122444.0064" calcext:value-type="float">
            <text:p>122444.0064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Cantidad</text:p>
          </table:table-cell>
          <table:table-cell table:style-name="ce21" table:formula="of:=[.C8]" office:value-type="float" office:value="10000" calcext:value-type="float">
            <text:p>10000</text:p>
          </table:table-cell>
          <table:table-cell table:style-name="ce5" table:formula="of:=[.C21]*(1+[.$C$10])" office:value-type="float" office:value="10800" calcext:value-type="float">
            <text:p>10800</text:p>
          </table:table-cell>
          <table:table-cell table:style-name="ce5" table:formula="of:=[.D21]*(1+[.$C$10])" office:value-type="float" office:value="11664" calcext:value-type="float">
            <text:p>11664</text:p>
          </table:table-cell>
          <table:table-cell table:style-name="ce5" table:formula="of:=[.E21]*(1+[.$C$10])" office:value-type="float" office:value="12597.12" calcext:value-type="float">
            <text:p>12597.12</text:p>
          </table:table-cell>
          <table:table-cell table:style-name="ce5" table:formula="of:=[.F21]*(1+[.$C$10])" office:value-type="float" office:value="13604.8896" calcext:value-type="float">
            <text:p>13604.8896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Precio</text:p>
          </table:table-cell>
          <table:table-cell table:style-name="ce21" table:formula="of:=[.C9]" office:value-type="float" office:value="9" calcext:value-type="float">
            <text:p>9</text:p>
          </table:table-cell>
          <table:table-cell table:style-name="ce21" table:formula="of:=[.C22]" office:value-type="float" office:value="9" calcext:value-type="float">
            <text:p>9</text:p>
          </table:table-cell>
          <table:table-cell table:style-name="ce21" table:formula="of:=[.D22]" office:value-type="float" office:value="9" calcext:value-type="float">
            <text:p>9</text:p>
          </table:table-cell>
          <table:table-cell table:style-name="ce21" table:formula="of:=[.E22]" office:value-type="float" office:value="9" calcext:value-type="float">
            <text:p>9</text:p>
          </table:table-cell>
          <table:table-cell table:style-name="ce21" table:formula="of:=[.F22]"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 Variable Total</text:p>
          </table:table-cell>
          <table:table-cell table:style-name="ce5" table:formula="of:=[.$C$14]*[.C21]" office:value-type="float" office:value="18000" calcext:value-type="float">
            <text:p>18000</text:p>
          </table:table-cell>
          <table:table-cell table:style-name="ce5" table:formula="of:=[.$C$14]*[.D21]" office:value-type="float" office:value="19440" calcext:value-type="float">
            <text:p>19440</text:p>
          </table:table-cell>
          <table:table-cell table:style-name="ce5" table:formula="of:=[.$C$14]*[.E21]" office:value-type="float" office:value="20995.2" calcext:value-type="float">
            <text:p>20995.2</text:p>
          </table:table-cell>
          <table:table-cell table:style-name="ce5" table:formula="of:=[.$C$14]*[.F21]" office:value-type="float" office:value="22674.816" calcext:value-type="float">
            <text:p>22674.816</text:p>
          </table:table-cell>
          <table:table-cell table:style-name="ce5" table:formula="of:=[.$C$14]*[.G21]" office:value-type="float" office:value="24488.80128" calcext:value-type="float">
            <text:p>24488.80128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 Fijo Total</text:p>
          </table:table-cell>
          <table:table-cell table:style-name="ce5" table:formula="of:=[.C13]" office:value-type="float" office:value="45000" calcext:value-type="float">
            <text:p>45000</text:p>
          </table:table-cell>
          <table:table-cell table:style-name="ce5" table:formula="of:=[.C24]" office:value-type="float" office:value="45000" calcext:value-type="float">
            <text:p>45000</text:p>
          </table:table-cell>
          <table:table-cell table:style-name="ce5" table:formula="of:=[.D24]" office:value-type="float" office:value="45000" calcext:value-type="float">
            <text:p>45000</text:p>
          </table:table-cell>
          <table:table-cell table:style-name="ce5" table:formula="of:=[.E24]" office:value-type="float" office:value="45000" calcext:value-type="float">
            <text:p>45000</text:p>
          </table:table-cell>
          <table:table-cell table:style-name="ce5" table:formula="of:=[.F24]" office:value-type="float" office:value="45000" calcext:value-type="float">
            <text:p>45000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Depreciaciones</text:p>
          </table:table-cell>
          <table:table-cell table:style-name="ce5" table:formula="of:=[.$C$5]/[.$C$7]" office:value-type="float" office:value="20000" calcext:value-type="float">
            <text:p>20000</text:p>
          </table:table-cell>
          <table:table-cell table:style-name="ce5" table:formula="of:=[.$C$5]/[.$C$7]" office:value-type="float" office:value="20000" calcext:value-type="float">
            <text:p>20000</text:p>
          </table:table-cell>
          <table:table-cell table:style-name="ce5" table:formula="of:=[.$C$5]/[.$C$7]" office:value-type="float" office:value="20000" calcext:value-type="float">
            <text:p>20000</text:p>
          </table:table-cell>
          <table:table-cell table:style-name="ce5" table:formula="of:=[.$C$5]/[.$C$7]" office:value-type="float" office:value="20000" calcext:value-type="float">
            <text:p>20000</text:p>
          </table:table-cell>
          <table:table-cell table:style-name="ce5" table:formula="of:=[.$C$5]/[.$C$7]" office:value-type="float" office:value="20000" calcext:value-type="float">
            <text:p>200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Utilidad Imponible</text:p>
          </table:table-cell>
          <table:table-cell table:style-name="ce7" table:formula="of:=[.C20]-[.C23]-[.C24]-[.C25]" office:value-type="float" office:value="7000" calcext:value-type="float">
            <text:p>7000</text:p>
          </table:table-cell>
          <table:table-cell table:style-name="ce7" table:formula="of:=[.D20]-[.D23]-[.D24]-[.D25]" office:value-type="float" office:value="12760" calcext:value-type="float">
            <text:p>12760</text:p>
          </table:table-cell>
          <table:table-cell table:style-name="ce7" table:formula="of:=[.E20]-[.E23]-[.E24]-[.E25]" office:value-type="float" office:value="18980.8" calcext:value-type="float">
            <text:p>18980.8</text:p>
          </table:table-cell>
          <table:table-cell table:style-name="ce7" table:formula="of:=[.F20]-[.F23]-[.F24]-[.F25]" office:value-type="float" office:value="25699.264" calcext:value-type="float">
            <text:p>25699.264</text:p>
          </table:table-cell>
          <table:table-cell table:style-name="ce7" table:formula="of:=[.G20]-[.G23]-[.G24]-[.G25]" office:value-type="float" office:value="32955.20512" calcext:value-type="float">
            <text:p>32955.20512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Impuestos</text:p>
          </table:table-cell>
          <table:table-cell table:style-name="ce5" table:formula="of:=[.C26]*[.$C$15]" office:value-type="float" office:value="2065" calcext:value-type="float">
            <text:p>2065</text:p>
          </table:table-cell>
          <table:table-cell table:style-name="ce5" table:formula="of:=[.D26]*[.$C$15]" office:value-type="float" office:value="3764.2" calcext:value-type="float">
            <text:p>3764.2</text:p>
          </table:table-cell>
          <table:table-cell table:style-name="ce5" table:formula="of:=[.E26]*[.$C$15]" office:value-type="float" office:value="5599.336" calcext:value-type="float">
            <text:p>5599.336</text:p>
          </table:table-cell>
          <table:table-cell table:style-name="ce5" table:formula="of:=[.F26]*[.$C$15]" office:value-type="float" office:value="7581.28288" calcext:value-type="float">
            <text:p>7581.28288</text:p>
          </table:table-cell>
          <table:table-cell table:style-name="ce5" table:formula="of:=[.G26]*[.$C$15]" office:value-type="float" office:value="9721.7855104" calcext:value-type="float">
            <text:p>9721.7855104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Utiliodad Neta</text:p>
          </table:table-cell>
          <table:table-cell table:style-name="ce8" table:formula="of:=[.C26]-[.C27]" office:value-type="float" office:value="4935" calcext:value-type="float">
            <text:p>4935</text:p>
          </table:table-cell>
          <table:table-cell table:style-name="ce8" table:formula="of:=[.D26]-[.D27]" office:value-type="float" office:value="8995.8" calcext:value-type="float">
            <text:p>8995.8</text:p>
          </table:table-cell>
          <table:table-cell table:style-name="ce8" table:formula="of:=[.E26]-[.E27]" office:value-type="float" office:value="13381.464" calcext:value-type="float">
            <text:p>13381.464</text:p>
          </table:table-cell>
          <table:table-cell table:style-name="ce8" table:formula="of:=[.F26]-[.F27]" office:value-type="float" office:value="18117.98112" calcext:value-type="float">
            <text:p>18117.98112</text:p>
          </table:table-cell>
          <table:table-cell table:style-name="ce8" table:formula="of:=[.G26]-[.G27]" office:value-type="float" office:value="23233.4196096" calcext:value-type="float">
            <text:p>23233.419609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FLUJO DE CAJA ECONÓMICO B</text:p>
          </table:table-cell>
          <table:covered-table-cell table:number-columns-repeated="6" table:style-name="ce9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RUBR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INGRESOS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D33:.D34])" office:value-type="float" office:value="90000" calcext:value-type="float">
            <text:p>90000</text:p>
          </table:table-cell>
          <table:table-cell table:style-name="ce22" table:formula="of:=SUM([.E33:.E34])" office:value-type="float" office:value="97200" calcext:value-type="float">
            <text:p>97200</text:p>
          </table:table-cell>
          <table:table-cell table:style-name="ce22" table:formula="of:=SUM([.F33:.F34])" office:value-type="float" office:value="104976" calcext:value-type="float">
            <text:p>104976</text:p>
          </table:table-cell>
          <table:table-cell table:style-name="ce22" table:formula="of:=SUM([.G33:.G34])" office:value-type="float" office:value="113374.08" calcext:value-type="float">
            <text:p>113374.08</text:p>
          </table:table-cell>
          <table:table-cell table:style-name="ce22" table:formula="of:=SUM([.H33:.H34])" office:value-type="float" office:value="142444.0064" calcext:value-type="float">
            <text:p>142444.0064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Ventas Netas</text:p>
          </table:table-cell>
          <table:table-cell table:style-name="ce21"/>
          <table:table-cell table:style-name="ce21" table:formula="of:=[.C20]" office:value-type="float" office:value="90000" calcext:value-type="float">
            <text:p>90000</text:p>
          </table:table-cell>
          <table:table-cell table:style-name="ce21" table:formula="of:=[.D20]" office:value-type="float" office:value="97200" calcext:value-type="float">
            <text:p>97200</text:p>
          </table:table-cell>
          <table:table-cell table:style-name="ce21" table:formula="of:=[.E20]" office:value-type="float" office:value="104976" calcext:value-type="float">
            <text:p>104976</text:p>
          </table:table-cell>
          <table:table-cell table:style-name="ce21" table:formula="of:=[.F20]" office:value-type="float" office:value="113374.08" calcext:value-type="float">
            <text:p>113374.08</text:p>
          </table:table-cell>
          <table:table-cell table:style-name="ce21" table:formula="of:=[.G20]" office:value-type="float" office:value="122444.0064" calcext:value-type="float">
            <text:p>122444.0064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Recupero KW</text:p>
          </table:table-cell>
          <table:table-cell table:style-name="ce21" table:number-columns-repeated="5"/>
          <table:table-cell table:style-name="ce21" table:formula="of:=[.C6]" office:value-type="float" office:value="20000" calcext:value-type="float">
            <text:p>20000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EGRESOS</text:p>
          </table:table-cell>
          <table:table-cell table:style-name="ce22" table:formula="of:=SUM([.C36:.C39])" office:value-type="float" office:value="-120000" calcext:value-type="float">
            <text:p>-120000</text:p>
          </table:table-cell>
          <table:table-cell table:style-name="ce22" table:formula="of:=SUM([.D36:.D39])" office:value-type="float" office:value="-65065" calcext:value-type="float">
            <text:p>-65065</text:p>
          </table:table-cell>
          <table:table-cell table:style-name="ce22" table:formula="of:=SUM([.E36:.E39])" office:value-type="float" office:value="-68204.2" calcext:value-type="float">
            <text:p>-68204.2</text:p>
          </table:table-cell>
          <table:table-cell table:style-name="ce22" table:formula="of:=SUM([.F36:.F39])" office:value-type="float" office:value="-71594.536" calcext:value-type="float">
            <text:p>-71594.536</text:p>
          </table:table-cell>
          <table:table-cell table:style-name="ce22" table:formula="of:=SUM([.G36:.G39])" office:value-type="float" office:value="-75256.09888" calcext:value-type="float">
            <text:p>-75256.09888</text:p>
          </table:table-cell>
          <table:table-cell table:style-name="ce22" table:formula="of:=SUM([.H36:.H39])" office:value-type="float" office:value="-79210.5867904" calcext:value-type="float">
            <text:p>-79210.5867904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Inversión</text:p>
          </table:table-cell>
          <table:table-cell table:style-name="ce5" table:formula="of:=-([.C5]+[.C6])" office:value-type="float" office:value="-120000" calcext:value-type="float">
            <text:p>-120000</text:p>
          </table:table-cell>
          <table:table-cell table:style-name="ce5" table:number-columns-repeated="5"/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osto Variable Total</text:p>
          </table:table-cell>
          <table:table-cell table:style-name="ce5"/>
          <table:table-cell table:style-name="ce5" table:formula="of:=-[.C23]" office:value-type="float" office:value="-18000" calcext:value-type="float">
            <text:p>-18000</text:p>
          </table:table-cell>
          <table:table-cell table:style-name="ce5" table:formula="of:=-[.D23]" office:value-type="float" office:value="-19440" calcext:value-type="float">
            <text:p>-19440</text:p>
          </table:table-cell>
          <table:table-cell table:style-name="ce5" table:formula="of:=-[.E23]" office:value-type="float" office:value="-20995.2" calcext:value-type="float">
            <text:p>-20995.2</text:p>
          </table:table-cell>
          <table:table-cell table:style-name="ce5" table:formula="of:=-[.F23]" office:value-type="float" office:value="-22674.816" calcext:value-type="float">
            <text:p>-22674.816</text:p>
          </table:table-cell>
          <table:table-cell table:style-name="ce5" table:formula="of:=-[.G23]" office:value-type="float" office:value="-24488.80128" calcext:value-type="float">
            <text:p>-24488.80128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osto Fijo Total</text:p>
          </table:table-cell>
          <table:table-cell table:style-name="ce5"/>
          <table:table-cell table:style-name="ce5" table:formula="of:=-[.C24]" office:value-type="float" office:value="-45000" calcext:value-type="float">
            <text:p>-45000</text:p>
          </table:table-cell>
          <table:table-cell table:style-name="ce5" table:formula="of:=-[.D24]" office:value-type="float" office:value="-45000" calcext:value-type="float">
            <text:p>-45000</text:p>
          </table:table-cell>
          <table:table-cell table:style-name="ce5" table:formula="of:=-[.E24]" office:value-type="float" office:value="-45000" calcext:value-type="float">
            <text:p>-45000</text:p>
          </table:table-cell>
          <table:table-cell table:style-name="ce5" table:formula="of:=-[.F24]" office:value-type="float" office:value="-45000" calcext:value-type="float">
            <text:p>-45000</text:p>
          </table:table-cell>
          <table:table-cell table:style-name="ce5" table:formula="of:=-[.G24]" office:value-type="float" office:value="-45000" calcext:value-type="float">
            <text:p>-4500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Impuestos</text:p>
          </table:table-cell>
          <table:table-cell table:style-name="ce5"/>
          <table:table-cell table:style-name="ce5" table:formula="of:=-[.C27]" office:value-type="float" office:value="-2065" calcext:value-type="float">
            <text:p>-2065</text:p>
          </table:table-cell>
          <table:table-cell table:style-name="ce5" table:formula="of:=-[.D27]" office:value-type="float" office:value="-3764.2" calcext:value-type="float">
            <text:p>-3764.2</text:p>
          </table:table-cell>
          <table:table-cell table:style-name="ce5" table:formula="of:=-[.E27]" office:value-type="float" office:value="-5599.336" calcext:value-type="float">
            <text:p>-5599.336</text:p>
          </table:table-cell>
          <table:table-cell table:style-name="ce5" table:formula="of:=-[.F27]" office:value-type="float" office:value="-7581.28288" calcext:value-type="float">
            <text:p>-7581.28288</text:p>
          </table:table-cell>
          <table:table-cell table:style-name="ce5" table:formula="of:=-[.G27]" office:value-type="float" office:value="-9721.7855104" calcext:value-type="float">
            <text:p>-9721.7855104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FLUJO DE CAJA ECONÓMICO FCE</text:p>
          </table:table-cell>
          <table:table-cell table:style-name="ce10" table:formula="of:=[.C32]+[.C35]" office:value-type="float" office:value="-120000" calcext:value-type="float">
            <text:p>-120000</text:p>
          </table:table-cell>
          <table:table-cell table:style-name="ce10" table:formula="of:=[.D32]+[.D35]" office:value-type="float" office:value="24935" calcext:value-type="float">
            <text:p>24935</text:p>
          </table:table-cell>
          <table:table-cell table:style-name="ce10" table:formula="of:=[.E32]+[.E35]" office:value-type="float" office:value="28995.8" calcext:value-type="float">
            <text:p>28995.8</text:p>
          </table:table-cell>
          <table:table-cell table:style-name="ce10" table:formula="of:=[.F32]+[.F35]" office:value-type="float" office:value="33381.464" calcext:value-type="float">
            <text:p>33381.464</text:p>
          </table:table-cell>
          <table:table-cell table:style-name="ce10" table:formula="of:=[.G32]+[.G35]" office:value-type="float" office:value="38117.98112" calcext:value-type="float">
            <text:p>38117.98112</text:p>
          </table:table-cell>
          <table:table-cell table:style-name="ce10" table:formula="of:=[.H32]+[.H35]" office:value-type="float" office:value="63233.4196096" calcext:value-type="float">
            <text:p>63233.419609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FLUJO DE CAJA ECONÓMICO A</text:p>
          </table:table-cell>
          <table:covered-table-cell table:number-columns-repeated="6" table:style-name="ce20"/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RUBR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tivo Fijo</text:p>
          </table:table-cell>
          <table:table-cell table:formula="of:=-[.C5]" office:value-type="float" office:value="-100000" calcext:value-type="float">
            <text:p>-100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apital de Trabjo</text:p>
          </table:table-cell>
          <table:table-cell table:formula="of:=-[.C6]" office:value-type="float" office:value="-20000" calcext:value-type="float">
            <text:p>-20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alor de Recupero KW</text:p>
          </table:table-cell>
          <table:table-cell table:number-columns-repeated="5"/>
          <table:table-cell table:formula="of:=[.C6]" office:value-type="float" office:value="20000" calcext:value-type="float">
            <text:p>20000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Flujo de Inversión de Liquidación</text:p>
          </table:table-cell>
          <table:table-cell table:style-name="ce12" table:formula="of:=SUM([.C44:.C46])" office:value-type="float" office:value="-120000" calcext:value-type="float">
            <text:p>-120000</text:p>
          </table:table-cell>
          <table:table-cell table:style-name="ce12" table:formula="of:=SUM([.D44:.D46])" office:value-type="float" office:value="0" calcext:value-type="float">
            <text:p>0</text:p>
          </table:table-cell>
          <table:table-cell table:style-name="ce12" table:formula="of:=SUM([.E44:.E46])" office:value-type="float" office:value="0" calcext:value-type="float">
            <text:p>0</text:p>
          </table:table-cell>
          <table:table-cell table:style-name="ce12" table:formula="of:=SUM([.F44:.F46])" office:value-type="float" office:value="0" calcext:value-type="float">
            <text:p>0</text:p>
          </table:table-cell>
          <table:table-cell table:style-name="ce12" table:formula="of:=SUM([.G44:.G46])" office:value-type="float" office:value="0" calcext:value-type="float">
            <text:p>0</text:p>
          </table:table-cell>
          <table:table-cell table:style-name="ce12" table:formula="of:=SUM([.H44:.H46])" office:value-type="float" office:value="20000" calcext:value-type="float">
            <text:p>20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greso en efecto</text:p>
          </table:table-cell>
          <table:table-cell/>
          <table:table-cell table:formula="of:=[.C20]" office:value-type="float" office:value="90000" calcext:value-type="float">
            <text:p>90000</text:p>
          </table:table-cell>
          <table:table-cell table:formula="of:=[.D20]" office:value-type="float" office:value="97200" calcext:value-type="float">
            <text:p>97200</text:p>
          </table:table-cell>
          <table:table-cell table:formula="of:=[.E20]" office:value-type="float" office:value="104976" calcext:value-type="float">
            <text:p>104976</text:p>
          </table:table-cell>
          <table:table-cell table:formula="of:=[.F20]" office:value-type="float" office:value="113374.08" calcext:value-type="float">
            <text:p>113374.08</text:p>
          </table:table-cell>
          <table:table-cell table:formula="of:=[.G20]" office:value-type="float" office:value="122444.0064" calcext:value-type="float">
            <text:p>122444.00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stos fijos</text:p>
          </table:table-cell>
          <table:table-cell/>
          <table:table-cell table:formula="of:=-[.C24]" office:value-type="float" office:value="-45000" calcext:value-type="float">
            <text:p>-45000</text:p>
          </table:table-cell>
          <table:table-cell table:formula="of:=-[.D24]" office:value-type="float" office:value="-45000" calcext:value-type="float">
            <text:p>-45000</text:p>
          </table:table-cell>
          <table:table-cell table:formula="of:=-[.E24]" office:value-type="float" office:value="-45000" calcext:value-type="float">
            <text:p>-45000</text:p>
          </table:table-cell>
          <table:table-cell table:formula="of:=-[.F24]" office:value-type="float" office:value="-45000" calcext:value-type="float">
            <text:p>-45000</text:p>
          </table:table-cell>
          <table:table-cell table:formula="of:=-[.G24]" office:value-type="float" office:value="-45000" calcext:value-type="float">
            <text:p>-45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stos variables</text:p>
          </table:table-cell>
          <table:table-cell/>
          <table:table-cell table:formula="of:=-[.C23]" office:value-type="float" office:value="-18000" calcext:value-type="float">
            <text:p>-18000</text:p>
          </table:table-cell>
          <table:table-cell table:formula="of:=-[.D23]" office:value-type="float" office:value="-19440" calcext:value-type="float">
            <text:p>-19440</text:p>
          </table:table-cell>
          <table:table-cell table:formula="of:=-[.E23]" office:value-type="float" office:value="-20995.2" calcext:value-type="float">
            <text:p>-20995.2</text:p>
          </table:table-cell>
          <table:table-cell table:formula="of:=-[.F23]" office:value-type="float" office:value="-22674.816" calcext:value-type="float">
            <text:p>-22674.816</text:p>
          </table:table-cell>
          <table:table-cell table:formula="of:=-[.G23]" office:value-type="float" office:value="-24488.80128" calcext:value-type="float">
            <text:p>-24488.801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mpuestos y tributos</text:p>
          </table:table-cell>
          <table:table-cell/>
          <table:table-cell table:formula="of:=-[.C27]" office:value-type="float" office:value="-2065" calcext:value-type="float">
            <text:p>-2065</text:p>
          </table:table-cell>
          <table:table-cell table:formula="of:=-[.D27]" office:value-type="float" office:value="-3764.2" calcext:value-type="float">
            <text:p>-3764.2</text:p>
          </table:table-cell>
          <table:table-cell table:formula="of:=-[.E27]" office:value-type="float" office:value="-5599.336" calcext:value-type="float">
            <text:p>-5599.336</text:p>
          </table:table-cell>
          <table:table-cell table:formula="of:=-[.F27]" office:value-type="float" office:value="-7581.28288" calcext:value-type="float">
            <text:p>-7581.28288</text:p>
          </table:table-cell>
          <table:table-cell table:formula="of:=-[.G27]" office:value-type="float" office:value="-9721.7855104" calcext:value-type="float">
            <text:p>-9721.7855104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Flujo de Caja Operativo</text:p>
          </table:table-cell>
          <table:table-cell table:style-name="ce12"/>
          <table:table-cell table:style-name="ce12" table:formula="of:=SUM([.D48:.D51])" office:value-type="float" office:value="24935" calcext:value-type="float">
            <text:p>24935</text:p>
          </table:table-cell>
          <table:table-cell table:style-name="ce12" table:formula="of:=SUM([.E48:.E51])" office:value-type="float" office:value="28995.8" calcext:value-type="float">
            <text:p>28995.8</text:p>
          </table:table-cell>
          <table:table-cell table:style-name="ce12" table:formula="of:=SUM([.F48:.F51])" office:value-type="float" office:value="33381.464" calcext:value-type="float">
            <text:p>33381.464</text:p>
          </table:table-cell>
          <table:table-cell table:style-name="ce12" table:formula="of:=SUM([.G48:.G51])" office:value-type="float" office:value="38117.98112" calcext:value-type="float">
            <text:p>38117.98112</text:p>
          </table:table-cell>
          <table:table-cell table:style-name="ce12" table:formula="of:=SUM([.H48:.H51])" office:value-type="float" office:value="43233.4196096" calcext:value-type="float">
            <text:p>43233.4196096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FLUJO DE CAJA ECONÓMICO FCE</text:p>
          </table:table-cell>
          <table:table-cell table:style-name="ce13" table:formula="of:=[.C47]+[.C52]" office:value-type="float" office:value="-120000" calcext:value-type="float">
            <text:p>-120000</text:p>
          </table:table-cell>
          <table:table-cell table:style-name="ce13" table:formula="of:=[.D47]+[.D52]" office:value-type="float" office:value="24935" calcext:value-type="float">
            <text:p>24935</text:p>
          </table:table-cell>
          <table:table-cell table:style-name="ce13" table:formula="of:=[.E47]+[.E52]" office:value-type="float" office:value="28995.8" calcext:value-type="float">
            <text:p>28995.8</text:p>
          </table:table-cell>
          <table:table-cell table:style-name="ce13" table:formula="of:=[.F47]+[.F52]" office:value-type="float" office:value="33381.464" calcext:value-type="float">
            <text:p>33381.464</text:p>
          </table:table-cell>
          <table:table-cell table:style-name="ce13" table:formula="of:=[.G47]+[.G52]" office:value-type="float" office:value="38117.98112" calcext:value-type="float">
            <text:p>38117.98112</text:p>
          </table:table-cell>
          <table:table-cell table:style-name="ce13" table:formula="of:=[.H47]+[.H52]" office:value-type="float" office:value="63233.4196096" calcext:value-type="float">
            <text:p>63233.419609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TIRE</text:p>
          </table:table-cell>
          <table:table-cell table:style-name="ce18" table:formula="of:=IRR([.C53:.H53])" office:value-type="percentage" office:value="0.146321425066921" calcext:value-type="percentage">
            <text:p>15 %</text:p>
          </table:table-cell>
          <table:table-cell office:value-type="string" calcext:value-type="string">
            <text:p>Promedio anual</text:p>
          </table:table-cell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VANE</text:p>
          </table:table-cell>
          <table:table-cell table:style-name="ce23" table:formula="of:=NPV([.C16];[.D53:.H53])+[.C53]" office:value-type="float" office:value="17009.7134333844" calcext:value-type="float">
            <text:p>$17,009.71 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PE</text:p>
          </table:table-cell>
          <table:table-cell table:number-columns-repeated="16382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ANÁLISIS DE SENSIBILIDA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ARIABLES</text:p>
          </table:table-cell>
          <table:table-cell table:number-columns-repeated="16382"/>
        </table:table-row>
        <table:table-row table:style-name="ro1">
          <table:table-cell/>
          <table:table-cell table:style-name="ce15" office:value-type="string" calcext:value-type="string">
            <text:p>Precio</text:p>
          </table:table-cell>
          <table:table-cell table:number-columns-repeated="16382"/>
        </table:table-row>
        <table:table-row table:style-name="ro1">
          <table:table-cell/>
          <table:table-cell table:style-name="ce15" office:value-type="string" calcext:value-type="string">
            <text:p>Tasa Crecimiento</text:p>
          </table:table-cell>
          <table:table-cell table:number-columns-repeated="16382"/>
        </table:table-row>
        <table:table-row table:style-name="ro1">
          <table:table-cell/>
          <table:table-cell table:style-name="ce15" office:value-type="string" calcext:value-type="string">
            <text:p>Precio Materia Prima</text:p>
          </table:table-cell>
          <table:table-cell table:number-columns-repeated="16382"/>
        </table:table-row>
        <table:table-row table:style-name="ro1">
          <table:table-cell/>
          <table:table-cell table:style-name="ce15" office:value-type="string" calcext:value-type="string">
            <text:p>Costo de Mano de Obra</text:p>
          </table:table-cell>
          <table:table-cell table:number-columns-repeated="16382"/>
        </table:table-row>
        <table:table-row table:style-name="ro1">
          <table:table-cell/>
          <table:table-cell table:style-name="ce15" office:value-type="string" calcext:value-type="string">
            <text:p>Costos Fij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. TASA DE CRECIMIENTO VS PRECIO</text:p>
          </table:table-cell>
          <table:table-cell table:number-columns-repeated="16382"/>
        </table:table-row>
        <table:table-row table:style-name="ro1">
          <table:table-cell/>
          <table:table-cell table:style-name="ce16" office:value-type="string" calcext:value-type="string">
            <text:p>¿Cómo varía en VANE al modificarse la tasa de crecimiento y el Precio del Product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PRECI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4" table:formula="of:=[.C56]" office:value-type="float" office:value="17009.7134333844" calcext:value-type="float">
            <text:p>$17,009.71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8" office:value-type="percentage" office:value="0.04" calcext:value-type="percentage">
            <text:p>4 %</text:p>
          </table:table-cell>
          <table:table-cell table:style-name="ce27" table:formula="of:=MULTIPLE.OPERATIONS([.$C$71];[.$C$10];[.$C72];[.$C$9];[.D$71])">
            <text:p/>
          </table:table-cell>
          <table:table-cell table:style-name="ce27" table:formula="of:=MULTIPLE.OPERATIONS([.$C$71];[.$C$10];[.$C72];[.$C$9];[.E$71])">
            <text:p/>
          </table:table-cell>
          <table:table-cell table:style-name="ce27" table:formula="of:=MULTIPLE.OPERATIONS([.$C$71];[.$C$10];[.$C72];[.$C$9];[.F$71])">
            <text:p/>
          </table:table-cell>
          <table:table-cell table:style-name="ce27" table:formula="of:=MULTIPLE.OPERATIONS([.$C$71];[.$C$10];[.$C72];[.$C$9];[.G$71])">
            <text:p/>
          </table:table-cell>
          <table:table-cell table:style-name="ce27" table:formula="of:=MULTIPLE.OPERATIONS([.$C$71];[.$C$10];[.$C72];[.$C$9];[.H$71])">
            <text:p/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8" office:value-type="percentage" office:value="0.06" calcext:value-type="percentage">
            <text:p>6 %</text:p>
          </table:table-cell>
          <table:table-cell table:style-name="ce27" table:formula="of:=MULTIPLE.OPERATIONS([.$C$71];[.$C$10];[.$C73];[.$C$9];[.D$71])">
            <text:p/>
          </table:table-cell>
          <table:table-cell table:style-name="ce27" table:formula="of:=MULTIPLE.OPERATIONS([.$C$71];[.$C$10];[.$C73];[.$C$9];[.E$71])">
            <text:p/>
          </table:table-cell>
          <table:table-cell table:style-name="ce27" table:formula="of:=MULTIPLE.OPERATIONS([.$C$71];[.$C$10];[.$C73];[.$C$9];[.F$71])">
            <text:p/>
          </table:table-cell>
          <table:table-cell table:style-name="ce27" table:formula="of:=MULTIPLE.OPERATIONS([.$C$71];[.$C$10];[.$C73];[.$C$9];[.G$71])">
            <text:p/>
          </table:table-cell>
          <table:table-cell table:style-name="ce27" table:formula="of:=MULTIPLE.OPERATIONS([.$C$71];[.$C$10];[.$C73];[.$C$9];[.H$71])">
            <text:p/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ASA DE CRECIMIENTO</text:p>
          </table:table-cell>
          <table:table-cell table:style-name="ce25" office:value-type="percentage" office:value="0.08" calcext:value-type="percentage">
            <text:p>8 %</text:p>
          </table:table-cell>
          <table:table-cell table:style-name="ce27" table:formula="of:=MULTIPLE.OPERATIONS([.$C$71];[.$C$10];[.$C74];[.$C$9];[.D$71])">
            <text:p/>
          </table:table-cell>
          <table:table-cell table:style-name="ce27" table:formula="of:=MULTIPLE.OPERATIONS([.$C$71];[.$C$10];[.$C74];[.$C$9];[.E$71])">
            <text:p/>
          </table:table-cell>
          <table:table-cell table:style-name="ce27" table:formula="of:=MULTIPLE.OPERATIONS([.$C$71];[.$C$10];[.$C74];[.$C$9];[.F$71])">
            <text:p/>
          </table:table-cell>
          <table:table-cell table:style-name="ce27" table:formula="of:=MULTIPLE.OPERATIONS([.$C$71];[.$C$10];[.$C74];[.$C$9];[.G$71])">
            <text:p/>
          </table:table-cell>
          <table:table-cell table:style-name="ce27" table:formula="of:=MULTIPLE.OPERATIONS([.$C$71];[.$C$10];[.$C74];[.$C$9];[.H$71])">
            <text:p/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8" office:value-type="percentage" office:value="0.1" calcext:value-type="percentage">
            <text:p>10 %</text:p>
          </table:table-cell>
          <table:table-cell table:style-name="ce27" table:formula="of:=MULTIPLE.OPERATIONS([.$C$71];[.$C$10];[.$C75];[.$C$9];[.D$71])">
            <text:p/>
          </table:table-cell>
          <table:table-cell table:style-name="ce27" table:formula="of:=MULTIPLE.OPERATIONS([.$C$71];[.$C$10];[.$C75];[.$C$9];[.E$71])">
            <text:p/>
          </table:table-cell>
          <table:table-cell table:style-name="ce27" table:formula="of:=MULTIPLE.OPERATIONS([.$C$71];[.$C$10];[.$C75];[.$C$9];[.F$71])">
            <text:p/>
          </table:table-cell>
          <table:table-cell table:style-name="ce27" table:formula="of:=MULTIPLE.OPERATIONS([.$C$71];[.$C$10];[.$C75];[.$C$9];[.G$71])">
            <text:p/>
          </table:table-cell>
          <table:table-cell table:style-name="ce27" table:formula="of:=MULTIPLE.OPERATIONS([.$C$71];[.$C$10];[.$C75];[.$C$9];[.H$71])">
            <text:p/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8" office:value-type="percentage" office:value="0.12" calcext:value-type="percentage">
            <text:p>12 %</text:p>
          </table:table-cell>
          <table:table-cell table:style-name="ce27" table:formula="of:=MULTIPLE.OPERATIONS([.$C$71];[.$C$10];[.$C76];[.$C$9];[.D$71])">
            <text:p/>
          </table:table-cell>
          <table:table-cell table:style-name="ce27" table:formula="of:=MULTIPLE.OPERATIONS([.$C$71];[.$C$10];[.$C76];[.$C$9];[.E$71])">
            <text:p/>
          </table:table-cell>
          <table:table-cell table:style-name="ce27" table:formula="of:=MULTIPLE.OPERATIONS([.$C$71];[.$C$10];[.$C76];[.$C$9];[.F$71])">
            <text:p/>
          </table:table-cell>
          <table:table-cell table:style-name="ce27" table:formula="of:=MULTIPLE.OPERATIONS([.$C$71];[.$C$10];[.$C76];[.$C$9];[.G$71])">
            <text:p/>
          </table:table-cell>
          <table:table-cell table:style-name="ce27" table:formula="of:=MULTIPLE.OPERATIONS([.$C$71];[.$C$10];[.$C76];[.$C$9];[.H$71])">
            <text:p/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. COSTOS FIJOS VS PRECIO MATERIA PRIMA</text:p>
          </table:table-cell>
          <table:table-cell table:number-columns-repeated="16382"/>
        </table:table-row>
        <table:table-row table:style-name="ro1">
          <table:table-cell/>
          <table:table-cell table:style-name="ce16" office:value-type="string" calcext:value-type="string">
            <text:p>¿Cómo varía la TIRE al modificarse el Costo Fijo y el Precio de Materia Prim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" table:formula="of:=[.C55]" office:value-type="percentage" office:value="0.146321425066921" calcext:value-type="percentage">
            <text:p>15 %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table:style-name="ce28" table:formula="of:=MULTIPLE.OPERATIONS([.$C$83];[.$C$13];[.$C84];[.$C$11];[.D$83])">
            <text:p/>
          </table:table-cell>
          <table:table-cell table:style-name="ce28" table:formula="of:=MULTIPLE.OPERATIONS([.$C$83];[.$C$13];[.$C84];[.$C$11];[.E$83])">
            <text:p/>
          </table:table-cell>
          <table:table-cell table:style-name="ce28" table:formula="of:=MULTIPLE.OPERATIONS([.$C$83];[.$C$13];[.$C84];[.$C$11];[.F$83])">
            <text:p/>
          </table:table-cell>
          <table:table-cell table:style-name="ce28" table:formula="of:=MULTIPLE.OPERATIONS([.$C$83];[.$C$13];[.$C84];[.$C$11];[.G$83])">
            <text:p/>
          </table:table-cell>
          <table:table-cell table:style-name="ce28" table:formula="of:=MULTIPLE.OPERATIONS([.$C$83];[.$C$13];[.$C84];[.$C$11];[.H$83])">
            <text:p/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3000" calcext:value-type="float">
            <text:p>43000</text:p>
          </table:table-cell>
          <table:table-cell table:style-name="ce28" table:formula="of:=MULTIPLE.OPERATIONS([.$C$83];[.$C$13];[.$C85];[.$C$11];[.D$83])">
            <text:p/>
          </table:table-cell>
          <table:table-cell table:style-name="ce28" table:formula="of:=MULTIPLE.OPERATIONS([.$C$83];[.$C$13];[.$C85];[.$C$11];[.E$83])">
            <text:p/>
          </table:table-cell>
          <table:table-cell table:style-name="ce28" table:formula="of:=MULTIPLE.OPERATIONS([.$C$83];[.$C$13];[.$C85];[.$C$11];[.F$83])">
            <text:p/>
          </table:table-cell>
          <table:table-cell table:style-name="ce28" table:formula="of:=MULTIPLE.OPERATIONS([.$C$83];[.$C$13];[.$C85];[.$C$11];[.G$83])">
            <text:p/>
          </table:table-cell>
          <table:table-cell table:style-name="ce28" table:formula="of:=MULTIPLE.OPERATIONS([.$C$83];[.$C$13];[.$C85];[.$C$11];[.H$83])">
            <text:p/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table:style-name="ce28" table:formula="of:=MULTIPLE.OPERATIONS([.$C$83];[.$C$13];[.$C86];[.$C$11];[.D$83])">
            <text:p/>
          </table:table-cell>
          <table:table-cell table:style-name="ce28" table:formula="of:=MULTIPLE.OPERATIONS([.$C$83];[.$C$13];[.$C86];[.$C$11];[.E$83])">
            <text:p/>
          </table:table-cell>
          <table:table-cell table:style-name="ce28" table:formula="of:=MULTIPLE.OPERATIONS([.$C$83];[.$C$13];[.$C86];[.$C$11];[.F$83])">
            <text:p/>
          </table:table-cell>
          <table:table-cell table:style-name="ce28" table:formula="of:=MULTIPLE.OPERATIONS([.$C$83];[.$C$13];[.$C86];[.$C$11];[.G$83])">
            <text:p/>
          </table:table-cell>
          <table:table-cell table:style-name="ce28" table:formula="of:=MULTIPLE.OPERATIONS([.$C$83];[.$C$13];[.$C86];[.$C$11];[.H$83])">
            <text:p/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7000" calcext:value-type="float">
            <text:p>47000</text:p>
          </table:table-cell>
          <table:table-cell table:style-name="ce28" table:formula="of:=MULTIPLE.OPERATIONS([.$C$83];[.$C$13];[.$C87];[.$C$11];[.D$83])">
            <text:p/>
          </table:table-cell>
          <table:table-cell table:style-name="ce28" table:formula="of:=MULTIPLE.OPERATIONS([.$C$83];[.$C$13];[.$C87];[.$C$11];[.E$83])">
            <text:p/>
          </table:table-cell>
          <table:table-cell table:style-name="ce28" table:formula="of:=MULTIPLE.OPERATIONS([.$C$83];[.$C$13];[.$C87];[.$C$11];[.F$83])">
            <text:p/>
          </table:table-cell>
          <table:table-cell table:style-name="ce28" table:formula="of:=MULTIPLE.OPERATIONS([.$C$83];[.$C$13];[.$C87];[.$C$11];[.G$83])">
            <text:p/>
          </table:table-cell>
          <table:table-cell table:style-name="ce28" table:formula="of:=MULTIPLE.OPERATIONS([.$C$83];[.$C$13];[.$C87];[.$C$11];[.H$83])">
            <text:p/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9000" calcext:value-type="float">
            <text:p>49000</text:p>
          </table:table-cell>
          <table:table-cell table:style-name="ce28" table:formula="of:=MULTIPLE.OPERATIONS([.$C$83];[.$C$13];[.$C88];[.$C$11];[.D$83])">
            <text:p/>
          </table:table-cell>
          <table:table-cell table:style-name="ce28" table:formula="of:=MULTIPLE.OPERATIONS([.$C$83];[.$C$13];[.$C88];[.$C$11];[.E$83])">
            <text:p/>
          </table:table-cell>
          <table:table-cell table:style-name="ce28" table:formula="of:=MULTIPLE.OPERATIONS([.$C$83];[.$C$13];[.$C88];[.$C$11];[.F$83])">
            <text:p/>
          </table:table-cell>
          <table:table-cell table:style-name="ce28" table:formula="of:=MULTIPLE.OPERATIONS([.$C$83];[.$C$13];[.$C88];[.$C$11];[.G$83])">
            <text:p/>
          </table:table-cell>
          <table:table-cell table:style-name="ce28" table:formula="of:=MULTIPLE.OPERATIONS([.$C$83];[.$C$13];[.$C88];[.$C$11];[.H$83])">
            <text:p/>
          </table:table-cell>
          <table:table-cell table:number-columns-repeated="16376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D84:Sheet1.H88">
            <calcext:condition calcext:apply-style-name="ConditionalStyle_2" calcext:value="&gt;0" calcext:base-cell-address="Sheet1.D84"/>
            <calcext:condition calcext:apply-style-name="ConditionalStyle_1" calcext:value="&lt;0" calcext:base-cell-address="Sheet1.D84"/>
          </calcext:conditional-format>
          <calcext:conditional-format calcext:target-range-address="Sheet1.D72:Sheet1.H76">
            <calcext:condition calcext:apply-style-name="ConditionalStyle_7" calcext:value="&lt;0" calcext:base-cell-address="Sheet1.D72"/>
            <calcext:condition calcext:apply-style-name="ConditionalStyle_6" calcext:value="&gt;0" calcext:base-cell-address="Sheet1.D7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E. Edison Achalma Mendoza</dc:creator>
    <meta:creation-date>2015-06-05T18:17:20</meta:creation-date>
    <dc:date>2022-07-12T23:39:03</dc:date>
    <meta:generator>LibreOffice/24.2.4.2$Linux_X86_64 LibreOffice_project/420$Build-2</meta:generator>
    <meta:document-statistic meta:table-count="1" meta:cell-count="307" meta:object-count="0"/>
    <meta:user-defined meta:name="AppVersion">16.0300</meta:user-defined>
  </office:meta>
</office:document-meta>
</file>