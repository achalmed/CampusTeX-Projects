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background-color="#ffff00"/>
    </style:style>
    <style:style style:name="T5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AH - ANÁLISIS DE SENSIBILIDAD</text:p>
      <text:p text:style-name="P1" loext:marker-style-name="T1"><text:span text:style-name="T1">Docente: E Edison Achalma Mendoza</text:span><text:span text:style-name="T1"/></text:p>
      <text:p text:style-name="P3"><text:line-break/>La empresa FORTEC S.A. está evaluando la oportunidad de invertir en <text:span text:style-name="T4">activo fijo</text:span><text:span text:style-name="T5"> cuyo valor es de S/. 100,000</text:span>, además de S<text:span text:style-name="T5">/. 20,000 para </text:span><text:span text:style-name="T4">capital de trabajo</text:span>. La vida del activo se estima en <text:span text:style-name="T3">5 años</text:span> en los cuales se deprecian totalmente. <text:span text:style-name="T2">(No hay valor de recupero)</text:span></text:p>
      <text:p text:style-name="P3">La demanda en el periodo 1 es de <text:span text:style-name="T4">10,000 unidades</text:span> con una tasa de crecimiento promedio anual de 8% durante el horizonte de evaluación del proyecto de 5 periodos</text:p>
      <text:p text:style-name="P3">El valor de <text:span text:style-name="T5">venta unitario es de S/. 9</text:span> y el valor de los costos unitarios son: <text:span text:style-name="T5">materia prima S/. 1.20</text:span>, <text:span text:style-name="T5">mano de obra S/. 0.60</text:span>. Los costos fijos sin incluir depreciación son <text:span text:style-name="T5">S/. 45,000</text:span> por periodo. Si la tasa de <text:span text:style-name="T5">impuesto a la renta es de 29.5%</text:span> y el <text:span text:style-name="T3">costo de oportunidad del 10% (COK),</text:span> evalúe el proyecto y realice el análisis de sensibilidad.</text:p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P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editing-cycles>7</meta:editing-cycles>
    <meta:creation-date>2022-07-12T21:21:00</meta:creation-date>
    <dc:date>2022-07-12T22:26:00</dc:date>
    <meta:editing-duration>PT16M</meta:editing-duration>
    <meta:generator>LibreOffice/24.2.4.2$Linux_X86_64 LibreOffice_project/420$Build-2</meta:generator>
    <meta:document-statistic meta:table-count="0" meta:image-count="0" meta:object-count="0" meta:page-count="1" meta:paragraph-count="5" meta:word-count="151" meta:character-count="824" meta:non-whitespace-character-count="677"/>
    <meta:user-defined meta:name="AppVersion">16.0000</meta:user-defined>
    <meta:template xlink:type="simple" xlink:actuate="onRequest" xlink:title="Normal.dotm" xlink:href=""/>
  </office:meta>
</office:document-meta>
</file>