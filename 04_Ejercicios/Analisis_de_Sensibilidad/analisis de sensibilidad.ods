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1.399cm"/>
    </style:style>
    <style:style style:name="co14" style:family="table-column">
      <style:table-column-properties fo:break-before="auto" style:column-width="1.453cm"/>
    </style:style>
    <style:style style:name="co15" style:family="table-column">
      <style:table-column-properties fo:break-before="auto" style:column-width="6.0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ta1" style:family="table" style:master-page-name="PageStyle_5f_Escenario_20_1">
      <style:table-properties table:display="true" style:writing-mode="lr-tb"/>
    </style:style>
    <style:style style:name="ta2" style:family="table" style:master-page-name="PageStyle_5f_eSCENARIO_20_2">
      <style:table-properties table:display="true" style:writing-mode="lr-tb"/>
    </style:style>
    <style:style style:name="ta3" style:family="table" style:master-page-name="PageStyle_5f_Sensibilidad">
      <style:table-properties table:display="true" style:writing-mode="lr-tb"/>
    </style:style>
    <style:style style:name="ta4" style:family="table" style:master-page-name="PageStyle_5f_Sensibilidad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3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13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1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Comma" style:data-style-name="N133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20_Built-in_20_Comma" style:data-style-name="N13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7375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2" loext:color-type="theme">
          <loext:transformation loext:type="lummod" loext:value="7500"/>
        </loext:char-complex-color>
      </style:text-properties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Excel_20_Built-in_20_Comma" style:data-style-name="N133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Comma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Comma" style:data-style-name="N13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7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3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Excel_20_Built-in_20_Comma" style:data-style-name="N133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9" style:family="table-cell" style:parent-style-name="Default" style:data-style-name="N2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lt;0" style:apply-style-name="ConditionalStyle_5f_7" style:base-cell-address="Sensibilidad.D64"/>
    </style:style>
    <style:style style:name="ce111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lt;0" style:apply-style-name="ConditionalStyle_5f_7" style:base-cell-address="Sensibilidad.D64"/>
    </style:style>
    <style:style style:name="ce11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lt;0" style:apply-style-name="ConditionalStyle_5f_7" style:base-cell-address="Sensibilidad.D64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lt;0" style:apply-style-name="ConditionalStyle_5f_7" style:base-cell-address="Sensibilidad.D64"/>
    </style:style>
    <style:style style:name="ce1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 style:data-style-name="N1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 style:data-style-name="N1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3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4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7" style:base-cell-address="Sensibilidad.D64"/>
    </style:style>
    <style:style style:name="ce136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39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40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4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42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8" style:base-cell-address="Sensibilidad.E106"/>
    </style:style>
    <style:style style:name="ce143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8" style:base-cell-address="Sensibilidad.E106"/>
    </style:style>
    <style:style style:name="ce144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.1" style:apply-style-name="ConditionalStyle_5f_1" style:base-cell-address="Sensibilidad.E119"/>
    </style:style>
    <style:style style:name="ce14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.1" style:apply-style-name="ConditionalStyle_5f_1" style:base-cell-address="Sensibilidad.E119"/>
    </style:style>
    <style:style style:name="ce14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0.1" style:apply-style-name="ConditionalStyle_5f_1" style:base-cell-address="Sensibilidad.E119"/>
    </style:style>
    <style:style style:name="ce148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5" style:base-cell-address="Sensibilidad.E119"/>
      <style:map style:condition="cell-content()&gt;0" style:apply-style-name="ConditionalStyle_5f_4" style:base-cell-address="Sensibilidad.E119"/>
    </style:style>
    <style:style style:name="ce149" style:family="table-cell" style:parent-style-name="Excel_20_Built-in_20_Percent" style:data-style-name="N13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3" style:base-cell-address="Sensibilidad.F64"/>
      <style:map style:condition="cell-content()&gt;0" style:apply-style-name="ConditionalStyle_5f_2" style:base-cell-address="Sensibilidad.F64"/>
    </style:style>
    <style:style style:name="ce150" style:family="table-cell" style:parent-style-name="Excel_20_Built-in_20_Percent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0" style:apply-style-name="ConditionalStyle_5f_6" style:base-cell-address="Sensibilidad.F64"/>
    </style:style>
    <style:style style:name="ce15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55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5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8" style:base-cell-address="Sensibilidad.E106"/>
    </style:style>
    <style:style style:name="ce157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8" style:base-cell-address="Sensibilidad.E106"/>
    </style:style>
    <style:style style:name="ce15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5" style:base-cell-address="Sensibilidad.E119"/>
      <style:map style:condition="cell-content()&gt;0" style:apply-style-name="ConditionalStyle_5f_4" style:base-cell-address="Sensibilidad.E119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64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6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8" style:base-cell-address="Sensibilidad.E106"/>
    </style:style>
    <style:style style:name="ce16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0.1" style:apply-style-name="ConditionalStyle_5f_1" style:base-cell-address="Sensibilidad.E119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Excel_20_Built-in_20_Comma" style:data-style-name="N133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gt;0" style:apply-style-name="ConditionalStyle_5f_11" style:base-cell-address="Sensibilidad.E93"/>
      <style:map style:condition="cell-content()&lt;0" style:apply-style-name="ConditionalStyle_5f_10" style:base-cell-address="Sensibilidad.E93"/>
      <style:map style:condition="cell-content()&gt;0" style:apply-style-name="ConditionalStyle_5f_9" style:base-cell-address="Sensibilidad.E93"/>
    </style:style>
    <style:style style:name="ce176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ConditionalStyle_5f_8" style:base-cell-address="Sensibilidad.E106"/>
    </style:style>
    <style:style style:name="ce1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2" style:family="table-cell" style:parent-style-name="Default" style:data-style-name="N2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lt;0" style:apply-style-name="ConditionalStyle_5f_5" style:base-cell-address="Sensibilidad.E119"/>
      <style:map style:condition="cell-content()&gt;0" style:apply-style-name="ConditionalStyle_5f_4" style:base-cell-address="Sensibilidad.E119"/>
    </style:style>
    <style:style style:name="ce18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2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ackground-color="#254061" style:rotation-align="non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1" style:family="table-cell" style:parent-style-name="Default">
      <style:table-cell-properties fo:background-color="#254061" style:rotation-align="none">
        <loext:background-complex-color loext:theme-type="accent1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 style:data-style-name="N13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2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5" style:family="table-cell" style:parent-style-name="Default">
      <style:table-cell-properties style:cell-protect="protected" style:print-content="true"/>
    </style:style>
    <style:style style:name="ce206" style:family="table-cell" style:parent-style-name="Default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 style:data-style-name="N3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cell-protect="protected" style:print-content="true"/>
      <style:map style:condition="cell-content()&lt;0" style:apply-style-name="ConditionalStyle_5f_7" style:base-cell-address="OPTIMISTA.D64"/>
    </style:style>
    <style:style style:name="ce210" style:family="table-cell" style:parent-style-name="Default">
      <style:table-cell-properties style:cell-protect="protected" style:print-content="true"/>
      <style:map style:condition="cell-content()&gt;0" style:apply-style-name="ConditionalStyle_5f_11" style:base-cell-address="OPTIMISTA.E93"/>
      <style:map style:condition="cell-content()&lt;0" style:apply-style-name="ConditionalStyle_5f_10" style:base-cell-address="OPTIMISTA.E93"/>
      <style:map style:condition="cell-content()&gt;0" style:apply-style-name="ConditionalStyle_5f_9" style:base-cell-address="OPTIMISTA.E93"/>
    </style:style>
    <style:style style:name="ce211" style:family="table-cell" style:parent-style-name="Default">
      <style:table-cell-properties style:cell-protect="protected" style:print-content="true"/>
      <style:map style:condition="cell-content()&lt;0" style:apply-style-name="ConditionalStyle_5f_8" style:base-cell-address="OPTIMISTA.E106"/>
    </style:style>
    <style:style style:name="ce212" style:family="table-cell" style:parent-style-name="Default">
      <style:table-cell-properties style:cell-protect="protected" style:print-content="true"/>
      <style:map style:condition="cell-content()&gt;0.1" style:apply-style-name="ConditionalStyle_5f_1" style:base-cell-address="OPTIMISTA.E119"/>
    </style:style>
    <style:style style:name="ce213" style:family="table-cell" style:parent-style-name="Default">
      <style:table-cell-properties style:cell-protect="protected" style:print-content="true"/>
      <style:map style:condition="cell-content()&lt;0" style:apply-style-name="ConditionalStyle_5f_5" style:base-cell-address="OPTIMISTA.E119"/>
      <style:map style:condition="cell-content()&gt;0" style:apply-style-name="ConditionalStyle_5f_4" style:base-cell-address="OPTIMISTA.E119"/>
    </style:style>
    <style:style style:name="ce214" style:family="table-cell" style:parent-style-name="Default">
      <style:table-cell-properties style:cell-protect="protected" style:print-content="true"/>
      <style:map style:condition="cell-content()&lt;0" style:apply-style-name="ConditionalStyle_5f_3" style:base-cell-address="OPTIMISTA.F64"/>
      <style:map style:condition="cell-content()&gt;0" style:apply-style-name="ConditionalStyle_5f_2" style:base-cell-address="OPTIMISTA.F64"/>
    </style:style>
    <style:style style:name="ce215" style:family="table-cell" style:parent-style-name="Default">
      <style:table-cell-properties style:cell-protect="protected" style:print-content="true"/>
      <style:map style:condition="cell-content()&gt;0" style:apply-style-name="ConditionalStyle_5f_6" style:base-cell-address="OPTIMISTA.F64"/>
    </style:style>
    <style:style style:name="ce216" style:family="table-cell" style:parent-style-name="Default">
      <style:table-cell-properties style:cell-protect="protected" style:print-content="true"/>
      <style:map style:condition="cell-content()&lt;0" style:apply-style-name="ConditionalStyle_5f_7" style:base-cell-address="PESIMISTA.D64"/>
    </style:style>
    <style:style style:name="ce217" style:family="table-cell" style:parent-style-name="Default">
      <style:table-cell-properties style:cell-protect="protected" style:print-content="true"/>
      <style:map style:condition="cell-content()&gt;0" style:apply-style-name="ConditionalStyle_5f_11" style:base-cell-address="PESIMISTA.E93"/>
      <style:map style:condition="cell-content()&lt;0" style:apply-style-name="ConditionalStyle_5f_10" style:base-cell-address="PESIMISTA.E93"/>
      <style:map style:condition="cell-content()&gt;0" style:apply-style-name="ConditionalStyle_5f_9" style:base-cell-address="PESIMISTA.E93"/>
    </style:style>
    <style:style style:name="ce218" style:family="table-cell" style:parent-style-name="Default">
      <style:table-cell-properties style:cell-protect="protected" style:print-content="true"/>
      <style:map style:condition="cell-content()&lt;0" style:apply-style-name="ConditionalStyle_5f_8" style:base-cell-address="PESIMISTA.E106"/>
    </style:style>
    <style:style style:name="ce219" style:family="table-cell" style:parent-style-name="Default">
      <style:table-cell-properties style:cell-protect="protected" style:print-content="true"/>
      <style:map style:condition="cell-content()&gt;0.1" style:apply-style-name="ConditionalStyle_5f_1" style:base-cell-address="PESIMISTA.E119"/>
    </style:style>
    <style:style style:name="ce220" style:family="table-cell" style:parent-style-name="Default">
      <style:table-cell-properties style:cell-protect="protected" style:print-content="true"/>
      <style:map style:condition="cell-content()&lt;0" style:apply-style-name="ConditionalStyle_5f_5" style:base-cell-address="PESIMISTA.E119"/>
      <style:map style:condition="cell-content()&gt;0" style:apply-style-name="ConditionalStyle_5f_4" style:base-cell-address="PESIMISTA.E119"/>
    </style:style>
    <style:style style:name="ce221" style:family="table-cell" style:parent-style-name="Default">
      <style:table-cell-properties style:cell-protect="protected" style:print-content="true"/>
      <style:map style:condition="cell-content()&lt;0" style:apply-style-name="ConditionalStyle_5f_3" style:base-cell-address="PESIMISTA.F64"/>
      <style:map style:condition="cell-content()&gt;0" style:apply-style-name="ConditionalStyle_5f_2" style:base-cell-address="PESIMISTA.F64"/>
    </style:style>
    <style:style style:name="ce222" style:family="table-cell" style:parent-style-name="Default">
      <style:table-cell-properties style:cell-protect="protected" style:print-content="true"/>
      <style:map style:condition="cell-content()&gt;0" style:apply-style-name="ConditionalStyle_5f_6" style:base-cell-address="PESIMISTA.F64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80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cena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-group>
          <table:table-column table:style-name="co3" table:number-columns-repeated="3" table:default-cell-style-name="ce8"/>
        </table:table-column-group>
        <table:table-column table:style-name="co1" table:number-columns-repeated="16379" table:default-cell-style-name="Default"/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2">
          <table:table-cell/>
          <table:table-cell table:style-name="ce1" office:value-type="string" calcext:value-type="string">
            <text:p>tabla 1</text:p>
          </table:table-cell>
          <table:table-cell table:style-name="ce1"/>
          <table:table-cell table:style-name="Default" table:number-columns-repeated="2"/>
          <table:table-cell table:number-columns-repeated="16379"/>
        </table:table-row>
        <table:table-row table:style-name="ro3">
          <table:table-cell/>
          <table:table-cell table:style-name="ce2" office:value-type="string" calcext:value-type="string">
            <text:p>Resumen de Escenarios</text:p>
          </table:table-cell>
          <table:table-cell table:style-name="ce2"/>
          <table:table-cell table:style-name="ce13" table:number-columns-repeated="2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VARIABLES</text:p>
          </table:table-cell>
          <table:table-cell table:style-name="ce7" office:value-type="string" calcext:value-type="string">
            <text:p>PROBABLE</text:p>
          </table:table-cell>
          <table:table-cell table:style-name="ce7" office:value-type="string" calcext:value-type="string">
            <text:p>OPTIMISTA</text:p>
          </table:table-cell>
          <table:table-cell table:style-name="ce7" office:value-type="string" calcext:value-type="string">
            <text:p>PESIMISTA</text:p>
          </table:table-cell>
          <table:table-cell table:number-columns-repeated="16379"/>
        </table:table-row>
        <table:table-row-group>
          <table:table-row table:style-name="ro4" table:visibility="collapse">
            <table:table-cell/>
            <table:table-cell table:style-name="ce4"/>
            <table:table-cell/>
            <table:table-cell table:number-columns-repeated="2" table:style-name="ce14" office:value-type="string" calcext:value-type="string">
              <text:p>Creado por Usuario el 9/07/2021</text:p>
            </table:table-cell>
            <table:table-cell table:number-columns-repeated="16379"/>
          </table:table-row>
        </table:table-row-group>
        <table:table-row table:style-name="ro1">
          <table:table-cell/>
          <table:table-cell table:style-name="ce4" office:value-type="string" calcext:value-type="string">
            <text:p>Celdas cambiantes:</text:p>
          </table:table-cell>
          <table:table-cell table:number-columns-repeated="16382"/>
        </table:table-row>
        <table:table-row-group>
          <table:table-row table:style-name="ro1">
            <table:table-cell/>
            <table:table-cell office:value-type="string" calcext:value-type="string">
              <text:p>Precio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8" calcext:value-type="float">
              <text:p>8</text:p>
            </table:table-cell>
            <table:table-cell table:number-columns-repeated="16379"/>
          </table:table-row>
          <table:table-row table:style-name="ro1">
            <table:table-cell/>
            <table:table-cell office:value-type="string" calcext:value-type="string">
              <text:p>Tasa</text:p>
            </table:table-cell>
            <table:table-cell table:style-name="ce9" office:value-type="percentage" office:value="0.08" calcext:value-type="percentage">
              <text:p>8.00 %</text:p>
            </table:table-cell>
            <table:table-cell table:style-name="ce9" office:value-type="percentage" office:value="0.09" calcext:value-type="percentage">
              <text:p>9.00 %</text:p>
            </table:table-cell>
            <table:table-cell table:style-name="ce9" office:value-type="percentage" office:value="0.07" calcext:value-type="percentage">
              <text:p>7.00 %</text:p>
            </table:table-cell>
            <table:table-cell table:number-columns-repeated="16379"/>
          </table:table-row>
          <table:table-row table:style-name="ro1">
            <table:table-cell/>
            <table:table-cell office:value-type="string" calcext:value-type="string">
              <text:p>Materia_Prima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1.1" calcext:value-type="float">
              <text:p>1.1</text:p>
            </table:table-cell>
            <table:table-cell office:value-type="float" office:value="1.3" calcext:value-type="float">
              <text:p>1.3</text:p>
            </table:table-cell>
            <table:table-cell table:number-columns-repeated="16379"/>
          </table:table-row>
          <table:table-row table:style-name="ro1">
            <table:table-cell/>
            <table:table-cell office:value-type="string" calcext:value-type="string">
              <text:p>Mano_de_Obra</text:p>
            </table:table-cell>
            <table:table-cell office:value-type="float" office:value="0.6" calcext:value-type="float">
              <text:p>0.6</text:p>
            </table:table-cell>
            <table:table-cell office:value-type="float" office:value="0.5" calcext:value-type="float">
              <text:p>0.5</text:p>
            </table:table-cell>
            <table:table-cell office:value-type="float" office:value="0.7" calcext:value-type="float">
              <text:p>0.7</text:p>
            </table:table-cell>
            <table:table-cell table:number-columns-repeated="16379"/>
          </table:table-row>
          <table:table-row table:style-name="ro1">
            <table:table-cell/>
            <table:table-cell office:value-type="string" calcext:value-type="string">
              <text:p>Costo_Fijo</text:p>
            </table:table-cell>
            <table:table-cell table:style-name="ce10" office:value-type="float" office:value="45000" calcext:value-type="float">
              <text:p>45,000</text:p>
            </table:table-cell>
            <table:table-cell table:style-name="ce10" office:value-type="float" office:value="42000" calcext:value-type="float">
              <text:p>42,000</text:p>
            </table:table-cell>
            <table:table-cell table:style-name="ce10" office:value-type="float" office:value="48000" calcext:value-type="float">
              <text:p>48,000</text:p>
            </table:table-cell>
            <table:table-cell table:number-columns-repeated="16379"/>
          </table:table-row>
        </table:table-row-group>
        <table:table-row table:style-name="ro1">
          <table:table-cell/>
          <table:table-cell table:style-name="ce4" office:value-type="string" calcext:value-type="string">
            <text:p>Celdas de resultado:</text:p>
          </table:table-cell>
          <table:table-cell table:number-columns-repeated="16382"/>
        </table:table-row>
        <table:table-row-group>
          <table:table-row table:style-name="ro1">
            <table:table-cell/>
            <table:table-cell office:value-type="string" calcext:value-type="string">
              <text:p>VAN</text:p>
            </table:table-cell>
            <table:table-cell table:style-name="ce11" office:value-type="float" office:value="17009.7134333844" calcext:value-type="float">
              <text:p><text:s/>17,010 </text:p>
            </table:table-cell>
            <table:table-cell table:style-name="ce11" office:value-type="float" office:value="66870.7664542287" calcext:value-type="float">
              <text:p><text:s/>66,871 </text:p>
            </table:table-cell>
            <table:table-cell table:style-name="ce11" office:value-type="float" office:value="-31428.8854381532" calcext:value-type="float">
              <text:p><text:s/>(31,429)</text:p>
            </table:table-cell>
            <table:table-cell table:number-columns-repeated="16379"/>
          </table:table-row>
          <table:table-row table:style-name="ro1">
            <table:table-cell/>
            <table:table-cell office:value-type="string" calcext:value-type="string">
              <text:p>TIR</text:p>
            </table:table-cell>
            <table:table-cell table:style-name="ce9" office:value-type="percentage" office:value="0.146321425066921" calcext:value-type="percentage">
              <text:p>14.63 %</text:p>
            </table:table-cell>
            <table:table-cell table:style-name="ce9" office:value-type="percentage" office:value="0.272191772346998" calcext:value-type="percentage">
              <text:p>27.22 %</text:p>
            </table:table-cell>
            <table:table-cell table:style-name="ce9" office:value-type="percentage" office:value="0.00818770561643456" calcext:value-type="percentage">
              <text:p>0.82 %</text:p>
            </table:table-cell>
            <table:table-cell table:number-columns-repeated="16379"/>
          </table:table-row>
          <table:table-row table:style-name="ro1">
            <table:table-cell/>
            <table:table-cell table:style-name="ce6" office:value-type="string" calcext:value-type="string">
              <text:p>PEC</text:p>
            </table:table-cell>
            <table:table-cell table:style-name="ce12" office:value-type="float" office:value="6250" calcext:value-type="float">
              <text:p>6250</text:p>
            </table:table-cell>
            <table:table-cell table:style-name="ce12" office:value-type="float" office:value="5000" calcext:value-type="float">
              <text:p>5000</text:p>
            </table:table-cell>
            <table:table-cell table:style-name="ce12" office:value-type="float" office:value="8000" calcext:value-type="float">
              <text:p>8000</text:p>
            </table:table-cell>
            <table:table-cell table:number-columns-repeated="16379"/>
          </table:table-row>
        </table:table-row-group>
      </table:table>
      <table:table table:name="eSCENARIO 2" table:style-name="ta2">
        <table:table-column table:style-name="co1" table:default-cell-style-name="Default"/>
        <table:table-column table:style-name="co1" table:default-cell-style-name="ce17"/>
        <table:table-column table:style-name="co4" table:default-cell-style-name="ce17"/>
        <table:table-column-group>
          <table:table-column table:style-name="co3" table:number-columns-repeated="3" table:default-cell-style-name="Default"/>
        </table:table-column-group>
        <table:table-column table:style-name="co1" table:number-columns-repeated="16378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2">
          <table:table-cell/>
          <table:table-cell table:style-name="ce15" office:value-type="string" calcext:value-type="string">
            <text:p>Resumen del escenario</text:p>
          </table:table-cell>
          <table:table-cell table:style-name="ce15"/>
          <table:table-cell table:style-name="ce20" table:number-columns-repeated="3"/>
          <table:table-cell table:number-columns-repeated="16378"/>
        </table:table-row>
        <table:table-row table:style-name="ro2">
          <table:table-cell/>
          <table:table-cell table:style-name="ce16" table:number-columns-repeated="2"/>
          <table:table-cell table:style-name="ce21" office:value-type="string" calcext:value-type="string">
            <text:p>Valores actuales:</text:p>
          </table:table-cell>
          <table:table-cell table:style-name="ce21" office:value-type="string" calcext:value-type="string">
            <text:p>OPTIMISTA</text:p>
          </table:table-cell>
          <table:table-cell table:style-name="ce21" office:value-type="string" calcext:value-type="string">
            <text:p>PESIMISTA</text:p>
          </table:table-cell>
          <table:table-cell table:number-columns-repeated="16378"/>
        </table:table-row>
        <table:table-row-group>
          <table:table-row table:style-name="ro5" table:visibility="collapse">
            <table:table-cell table:number-columns-repeated="3"/>
            <table:table-cell table:style-name="ce22"/>
            <table:table-cell table:number-columns-repeated="2" table:style-name="ce28" office:value-type="string" calcext:value-type="string">
              <text:p>Creado por Usuario el 9/07/2021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18" office:value-type="string" calcext:value-type="string">
            <text:p>Celdas cambiantes:</text:p>
          </table:table-cell>
          <table:table-cell table:style-name="ce18"/>
          <table:table-cell table:style-name="ce23" table:number-columns-repeated="3"/>
          <table:table-cell table:number-columns-repeated="16378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Precio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9" office:value-type="float" office:value="9.5" calcext:value-type="float">
              <text:p>9.5</text:p>
            </table:table-cell>
            <table:table-cell table:style-name="ce29" office:value-type="float" office:value="8.5" calcext:value-type="float">
              <text:p>8.5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Tasa</text:p>
            </table:table-cell>
            <table:table-cell table:style-name="ce24" office:value-type="percentage" office:value="0.08" calcext:value-type="percentage">
              <text:p>8.00 %</text:p>
            </table:table-cell>
            <table:table-cell table:style-name="ce30" office:value-type="percentage" office:value="0.085" calcext:value-type="percentage">
              <text:p>8.50 %</text:p>
            </table:table-cell>
            <table:table-cell table:style-name="ce30" office:value-type="percentage" office:value="0.075" calcext:value-type="percentage">
              <text:p>7.50 %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Materia_Prima</text:p>
            </table:table-cell>
            <table:table-cell table:style-name="ce22" office:value-type="float" office:value="1.2" calcext:value-type="float">
              <text:p>1.2</text:p>
            </table:table-cell>
            <table:table-cell table:style-name="ce29" office:value-type="float" office:value="1.1" calcext:value-type="float">
              <text:p>1.1</text:p>
            </table:table-cell>
            <table:table-cell table:style-name="ce29" office:value-type="float" office:value="1.3" calcext:value-type="float">
              <text:p>1.3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Mano_de_Obra</text:p>
            </table:table-cell>
            <table:table-cell table:style-name="ce22" office:value-type="float" office:value="0.6" calcext:value-type="float">
              <text:p>0.6</text:p>
            </table:table-cell>
            <table:table-cell table:style-name="ce29" office:value-type="float" office:value="0.5" calcext:value-type="float">
              <text:p>0.5</text:p>
            </table:table-cell>
            <table:table-cell table:style-name="ce29" office:value-type="float" office:value="0.7" calcext:value-type="float">
              <text:p>0.7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Costo_Fijo</text:p>
            </table:table-cell>
            <table:table-cell table:style-name="ce25" office:value-type="float" office:value="45000" calcext:value-type="float">
              <text:p>45,000</text:p>
            </table:table-cell>
            <table:table-cell table:style-name="ce31" office:value-type="float" office:value="44000" calcext:value-type="float">
              <text:p>44,000</text:p>
            </table:table-cell>
            <table:table-cell table:style-name="ce31" office:value-type="float" office:value="46000" calcext:value-type="float">
              <text:p>46,000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18" office:value-type="string" calcext:value-type="string">
            <text:p>Celdas de resultado:</text:p>
          </table:table-cell>
          <table:table-cell table:style-name="ce18"/>
          <table:table-cell table:style-name="ce23" table:number-columns-repeated="3"/>
          <table:table-cell table:number-columns-repeated="16378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VAN</text:p>
            </table:table-cell>
            <table:table-cell table:style-name="ce26" office:value-type="float" office:value="17009.7134333844" calcext:value-type="float">
              <text:p><text:s/>17,010 </text:p>
            </table:table-cell>
            <table:table-cell table:style-name="ce26" office:value-type="float" office:value="43542.1247732841" calcext:value-type="float">
              <text:p><text:s/>43,542 </text:p>
            </table:table-cell>
            <table:table-cell table:style-name="ce26" office:value-type="float" office:value="-9110.92006448076" calcext:value-type="float">
              <text:p><text:s/>(9,111)</text:p>
            </table:table-cell>
            <table:table-cell table:number-columns-repeated="16378"/>
          </table:table-row>
          <table:table-row table:style-name="ro1">
            <table:table-cell table:number-columns-repeated="2"/>
            <table:table-cell office:value-type="string" calcext:value-type="string">
              <text:p>TIR</text:p>
            </table:table-cell>
            <table:table-cell table:style-name="ce24" office:value-type="percentage" office:value="0.146321425066921" calcext:value-type="percentage">
              <text:p>14.63 %</text:p>
            </table:table-cell>
            <table:table-cell table:style-name="ce24" office:value-type="percentage" office:value="0.214889014812933" calcext:value-type="percentage">
              <text:p>21.49 %</text:p>
            </table:table-cell>
            <table:table-cell table:style-name="ce24" office:value-type="percentage" office:value="0.0742891788307984" calcext:value-type="percentage">
              <text:p>7.43 %</text:p>
            </table:table-cell>
            <table:table-cell table:number-columns-repeated="16378"/>
          </table:table-row>
          <table:table-row table:style-name="ro1">
            <table:table-cell/>
            <table:table-cell table:style-name="ce19"/>
            <table:table-cell table:style-name="ce19" office:value-type="string" calcext:value-type="string">
              <text:p>PEC</text:p>
            </table:table-cell>
            <table:table-cell table:style-name="ce27" office:value-type="float" office:value="6250" calcext:value-type="float">
              <text:p>6250</text:p>
            </table:table-cell>
            <table:table-cell table:style-name="ce27" office:value-type="float" office:value="5569.62025316456" calcext:value-type="float">
              <text:p>5569.62025316456</text:p>
            </table:table-cell>
            <table:table-cell table:style-name="ce27" office:value-type="float" office:value="7076.92307692308" calcext:value-type="float">
              <text:p>7076.92307692308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Default" office:value-type="string" calcext:value-type="string">
            <text:p>Notas: La columna de valores actuales representa los valores de las celdas cambiantes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en el momento en que se creó el Informe resumen de escenario. Las celdas cambiantes de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cada escenario se muestran en gris.</text:p>
          </table:table-cell>
          <table:table-cell table:style-name="Default"/>
          <table:table-cell table:number-columns-repeated="16381"/>
        </table:table-row>
      </table:table>
      <table:table table:name="Sensibilidad" table:style-name="ta3">
        <office:forms form:automatic-focus="false" form:apply-design-mode="false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1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5" table:number-columns-repeated="16372" table:default-cell-style-name="ce32"/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CASO: EMPRESA FORTEC S.A.</text:p>
          </table:table-cell>
          <table:covered-table-cell table:number-columns-repeated="5" table:style-name="ce60"/>
          <table:covered-table-cell table:style-name="ce16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>
            <text:p>La empresa FORTEC S.A. está evaluando la oportunidad de invertir en activo fijo cuyo valor es de</text:p>
          </table:table-cell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S/. 100,000, además S/. 20,000 para capital de trabajo. La vida del activo se estima en 5 años</text:p>
          </table:table-cell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en los cuales se depreciarán totalmente.</text:p>
          </table:table-cell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La demanda en el periodo 1 es de 10,000 unidades con una tasa de crecimiento promedio anual de </text:p>
          </table:table-cell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8% durante el horizonte de evaluación del proyecto de 5 period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>
            <text:p>El valor <text:s/>de venta unitario es de S/. 9 y valor de los costos unitarios son: materia prima S/. 1.20, mano de</text:p>
          </table:table-cell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obra S/. 0.60. Los costos fijos sin incluir depreciación son S/. 45,000 por periodo. Si la tasa de</text:p>
          </table:table-cell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impuesto a la renta es de 29.5% y el costo de oportunidad del 10%, evalúe el proyecto y realice el </text:p>
          </table:table-cell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análisis de sensibilidad.</text:p>
          </table:table-cell>
          <table:table-cell table:number-columns-repeated="16382"/>
        </table:table-row>
        <table:table-row table:style-name="ro1">
          <table:table-cell/>
          <table:table-cell table:style-name="ce36" office:value-type="string" calcext:value-type="string">
            <text:p>SOLUCIÓN</text:p>
          </table:table-cell>
          <table:table-cell table:number-columns-repeated="16382"/>
        </table:table-row>
        <table:table-row table:style-name="ro1">
          <table:table-cell/>
          <table:table-cell table:style-name="ce34" office:value-type="string" calcext:value-type="string">
            <text:p>DATO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ctivo Fijo</text:p>
          </table:table-cell>
          <table:table-cell/>
          <table:table-cell table:style-name="ce89" office:value-type="float" office:value="100000" calcext:value-type="float">
            <text:p><text:s/>100,000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/>
          <table:table-cell table:style-name="ce90" office:value-type="float" office:value="20000" calcext:value-type="float">
            <text:p>20,0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ida útil</text:p>
          </table:table-cell>
          <table:table-cell/>
          <table:table-cell table:style-name="ce91" office:value-type="float" office:value="5" calcext:value-type="float">
            <text:p>5</text:p>
          </table:table-cell>
          <table:table-cell office:value-type="string" calcext:value-type="string">
            <text:p>años</text:p>
          </table:table-cell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Cantidad de ventas año 1</text:p>
          </table:table-cell>
          <table:table-cell/>
          <table:table-cell table:style-name="ce91" office:value-type="float" office:value="10000" calcext:value-type="float">
            <text:p>10000</text:p>
          </table:table-cell>
          <table:table-cell table:style-name="ce33" office:value-type="string" calcext:value-type="string">
            <text:p>unidades</text:p>
          </table:table-cell>
          <table:table-cell table:number-columns-repeated="16379"/>
        </table:table-row>
        <table:table-row table:style-name="ro1">
          <table:table-cell/>
          <table:table-cell table:style-name="ce37" office:value-type="string" calcext:value-type="string">
            <text:p>Precio</text:p>
          </table:table-cell>
          <table:table-cell table:style-name="ce37"/>
          <table:table-cell table:style-name="ce92" office:value-type="float" office:value="9" calcext:value-type="float">
            <text:p>9</text:p>
          </table:table-cell>
          <table:table-cell table:number-columns-repeated="4"/>
          <table:table-cell table:style-name="ce177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>
            <text:p>tasa crecimiento </text:p>
          </table:table-cell>
          <table:table-cell table:style-name="ce37"/>
          <table:table-cell table:style-name="ce93" office:value-type="percentage" office:value="0.08" calcext:value-type="percentage">
            <text:p>8.00 %</text:p>
          </table:table-cell>
          <table:table-cell table:number-columns-repeated="16380"/>
        </table:table-row>
        <table:table-row table:style-name="ro1">
          <table:table-cell/>
          <table:table-cell table:style-name="ce37" office:value-type="string" calcext:value-type="string">
            <text:p>Materia prima</text:p>
          </table:table-cell>
          <table:table-cell table:style-name="ce37"/>
          <table:table-cell table:style-name="ce94" office:value-type="float" office:value="1.2" calcext:value-type="float">
            <text:p>1.2</text:p>
          </table:table-cell>
          <table:table-cell office:value-type="string" calcext:value-type="string">
            <text:p>soles</text:p>
          </table:table-cell>
          <table:table-cell table:number-columns-repeated="16379"/>
        </table:table-row>
        <table:table-row table:style-name="ro1">
          <table:table-cell/>
          <table:table-cell table:style-name="ce37" office:value-type="string" calcext:value-type="string">
            <text:p>Mano de obra</text:p>
          </table:table-cell>
          <table:table-cell table:style-name="ce37"/>
          <table:table-cell table:style-name="ce94" office:value-type="float" office:value="0.6" calcext:value-type="float">
            <text:p>0.6</text:p>
          </table:table-cell>
          <table:table-cell office:value-type="string" calcext:value-type="string">
            <text:p>soles</text:p>
          </table:table-cell>
          <table:table-cell table:number-columns-repeated="16379"/>
        </table:table-row>
        <table:table-row table:style-name="ro1">
          <table:table-cell/>
          <table:table-cell table:style-name="ce37" office:value-type="string" calcext:value-type="string">
            <text:p>costo variable unitario</text:p>
          </table:table-cell>
          <table:table-cell table:style-name="ce37"/>
          <table:table-cell table:style-name="ce95" table:formula="of:=[.D22]+[.D23]" office:value-type="float" office:value="1.8" calcext:value-type="float">
            <text:p>1.8</text:p>
          </table:table-cell>
          <table:table-cell office:value-type="string" calcext:value-type="string">
            <text:p>soles</text:p>
          </table:table-cell>
          <table:table-cell table:number-columns-repeated="16379"/>
        </table:table-row>
        <table:table-row table:style-name="ro1">
          <table:table-cell/>
          <table:table-cell table:style-name="ce37" office:value-type="string" calcext:value-type="string">
            <text:p>Costo fijos</text:p>
          </table:table-cell>
          <table:table-cell table:style-name="ce37"/>
          <table:table-cell table:style-name="ce96" office:value-type="float" office:value="45000" calcext:value-type="float">
            <text:p>45,000</text:p>
          </table:table-cell>
          <table:table-cell office:value-type="string" calcext:value-type="string">
            <text:p>por periodo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asa de impuesto </text:p>
          </table:table-cell>
          <table:table-cell/>
          <table:table-cell table:style-name="ce97" office:value-type="percentage" office:value="0.295" calcext:value-type="percentage">
            <text:p>29.5%</text:p>
          </table:table-cell>
          <table:table-cell table:number-columns-repeated="16380"/>
        </table:table-row>
        <table:table-row table:style-name="ro1">
          <table:table-cell/>
          <table:table-cell table:style-name="ce33" office:value-type="string" calcext:value-type="string">
            <text:p>COK = Ku</text:p>
          </table:table-cell>
          <table:table-cell/>
          <table:table-cell table:style-name="ce98" office:value-type="percentage" office:value="0.1" calcext:value-type="percentage">
            <text:p>10 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 table:number-columns-spanned="7" table:number-rows-spanned="1">
            <text:p><text:s/>ESTADO DE RESULTADOS ECONÓMICO</text:p>
          </table:table-cell>
          <table:covered-table-cell table:number-columns-repeated="6" table:style-name="ce6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0" office:value-type="string" office:string-value="RUBRO" calcext:value-type="string" table:number-columns-spanned="2" table:number-rows-spanned="1">
            <text:p><text:s/>RUBRO </text:p>
          </table:table-cell>
          <table:covered-table-cell table:style-name="ce62"/>
          <table:table-cell table:style-name="ce99" office:value-type="float" office:value="1" calcext:value-type="float">
            <text:p><text:s/>1 </text:p>
          </table:table-cell>
          <table:table-cell table:style-name="ce99" table:formula="of:=[.D31]+1" office:value-type="float" office:value="2" calcext:value-type="float">
            <text:p><text:s/>2 </text:p>
          </table:table-cell>
          <table:table-cell table:style-name="ce99" table:formula="of:=[.E31]+1" office:value-type="float" office:value="3" calcext:value-type="float">
            <text:p><text:s/>3 </text:p>
          </table:table-cell>
          <table:table-cell table:style-name="ce99" table:formula="of:=[.F31]+1" office:value-type="float" office:value="4" calcext:value-type="float">
            <text:p><text:s/>4 </text:p>
          </table:table-cell>
          <table:table-cell table:style-name="ce170" table:formula="of:=[.G31]+1" office:value-type="float" office:value="5" calcext:value-type="float">
            <text:p><text:s/>5 </text:p>
          </table:table-cell>
          <table:table-cell table:number-columns-repeated="16376"/>
        </table:table-row>
        <table:table-row table:style-name="ro1">
          <table:table-cell/>
          <table:table-cell table:style-name="ce41" office:value-type="string" office:string-value="Ingresos" calcext:value-type="string" table:number-columns-spanned="2" table:number-rows-spanned="1">
            <text:p><text:s/>Ingresos </text:p>
          </table:table-cell>
          <table:covered-table-cell table:style-name="ce63"/>
          <table:table-cell table:style-name="ce100" table:formula="of:=[.D33]*[.D34]" office:value-type="float" office:value="90000" calcext:value-type="float">
            <text:p>90000.00</text:p>
          </table:table-cell>
          <table:table-cell table:style-name="ce100" table:formula="of:=[.E33]*[.E34]" office:value-type="float" office:value="97200" calcext:value-type="float">
            <text:p>97200.00</text:p>
          </table:table-cell>
          <table:table-cell table:style-name="ce100" table:formula="of:=[.F33]*[.F34]" office:value-type="float" office:value="104976" calcext:value-type="float">
            <text:p>104976.00</text:p>
          </table:table-cell>
          <table:table-cell table:style-name="ce100" table:formula="of:=[.G33]*[.G34]" office:value-type="float" office:value="113374.08" calcext:value-type="float">
            <text:p>113374.08</text:p>
          </table:table-cell>
          <table:table-cell table:style-name="ce171" table:formula="of:=[.H33]*[.H34]" office:value-type="float" office:value="122444.0064" calcext:value-type="float">
            <text:p>122444.01</text:p>
          </table:table-cell>
          <table:table-cell table:number-columns-repeated="16376"/>
        </table:table-row>
        <table:table-row table:style-name="ro1">
          <table:table-cell/>
          <table:table-cell table:style-name="ce42" office:value-type="string" office:string-value="Cantidad" calcext:value-type="string" table:number-columns-spanned="2" table:number-rows-spanned="1">
            <text:p><text:s/>Cantidad </text:p>
          </table:table-cell>
          <table:covered-table-cell table:style-name="ce64"/>
          <table:table-cell table:style-name="ce101" table:formula="of:=[.D19]" office:value-type="float" office:value="10000" calcext:value-type="float">
            <text:p>10000.00</text:p>
          </table:table-cell>
          <table:table-cell table:style-name="ce101" table:formula="of:=[.D33]*(1+Tasa)" office:value-type="float" office:value="10800" calcext:value-type="float">
            <text:p>10800.00</text:p>
          </table:table-cell>
          <table:table-cell table:style-name="ce101" table:formula="of:=[.E33]*(1+Tasa)" office:value-type="float" office:value="11664" calcext:value-type="float">
            <text:p>11664.00</text:p>
          </table:table-cell>
          <table:table-cell table:style-name="ce101" table:formula="of:=[.F33]*(1+Tasa)" office:value-type="float" office:value="12597.12" calcext:value-type="float">
            <text:p>12597.12</text:p>
          </table:table-cell>
          <table:table-cell table:style-name="ce101" table:formula="of:=[.G33]*(1+Tasa)" office:value-type="float" office:value="13604.8896" calcext:value-type="float">
            <text:p>13604.89</text:p>
          </table:table-cell>
          <table:table-cell table:number-columns-repeated="16376"/>
        </table:table-row>
        <table:table-row table:style-name="ro1">
          <table:table-cell/>
          <table:table-cell table:style-name="ce42" office:value-type="string" office:string-value="Precio" calcext:value-type="string" table:number-columns-spanned="2" table:number-rows-spanned="1">
            <text:p><text:s/>Precio </text:p>
          </table:table-cell>
          <table:covered-table-cell table:style-name="ce64"/>
          <table:table-cell table:style-name="ce102" table:formula="of:=Precio" office:value-type="float" office:value="9" calcext:value-type="float">
            <text:p>9.00</text:p>
          </table:table-cell>
          <table:table-cell table:style-name="ce102" table:formula="of:=Precio" office:value-type="float" office:value="9" calcext:value-type="float">
            <text:p>9.00</text:p>
          </table:table-cell>
          <table:table-cell table:style-name="ce102" table:formula="of:=Precio" office:value-type="float" office:value="9" calcext:value-type="float">
            <text:p>9.00</text:p>
          </table:table-cell>
          <table:table-cell table:style-name="ce102" table:formula="of:=Precio" office:value-type="float" office:value="9" calcext:value-type="float">
            <text:p>9.00</text:p>
          </table:table-cell>
          <table:table-cell table:style-name="ce172" table:formula="of:=Precio" office:value-type="float" office:value="9" calcext:value-type="float">
            <text:p>9.00</text:p>
          </table:table-cell>
          <table:table-cell table:number-columns-repeated="16376"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43" office:value-type="string" office:string-value="Costo Variable Total" calcext:value-type="string" table:number-columns-spanned="2" table:number-rows-spanned="1">
            <text:p><text:s/>Costo Variable Total </text:p>
          </table:table-cell>
          <table:covered-table-cell table:style-name="ce65"/>
          <table:table-cell table:style-name="ce102" table:formula="of:=[.D33]*[.$D$24]" office:value-type="float" office:value="18000" calcext:value-type="float">
            <text:p>18000.00</text:p>
          </table:table-cell>
          <table:table-cell table:style-name="ce102" table:formula="of:=[.E33]*[.$D$24]" office:value-type="float" office:value="19440" calcext:value-type="float">
            <text:p>19440.00</text:p>
          </table:table-cell>
          <table:table-cell table:style-name="ce102" table:formula="of:=[.F33]*[.$D$24]" office:value-type="float" office:value="20995.2" calcext:value-type="float">
            <text:p>20995.20</text:p>
          </table:table-cell>
          <table:table-cell table:style-name="ce102" table:formula="of:=[.G33]*[.$D$24]" office:value-type="float" office:value="22674.816" calcext:value-type="float">
            <text:p>22674.82</text:p>
          </table:table-cell>
          <table:table-cell table:style-name="ce102" table:formula="of:=[.H33]*[.$D$24]" office:value-type="float" office:value="24488.80128" calcext:value-type="float">
            <text:p>24488.80</text:p>
          </table:table-cell>
          <table:table-cell table:number-columns-repeated="16376"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43" office:value-type="string" office:string-value="Costo Fijo Total" calcext:value-type="string" table:number-columns-spanned="2" table:number-rows-spanned="1">
            <text:p><text:s/>Costo Fijo Total </text:p>
          </table:table-cell>
          <table:covered-table-cell table:style-name="ce65"/>
          <table:table-cell table:style-name="ce102" table:formula="of:=Costo_Fijo" office:value-type="float" office:value="45000" calcext:value-type="float">
            <text:p>45000.00</text:p>
          </table:table-cell>
          <table:table-cell table:style-name="ce102" table:formula="of:=Costo_Fijo" office:value-type="float" office:value="45000" calcext:value-type="float">
            <text:p>45000.00</text:p>
          </table:table-cell>
          <table:table-cell table:style-name="ce102" table:formula="of:=Costo_Fijo" office:value-type="float" office:value="45000" calcext:value-type="float">
            <text:p>45000.00</text:p>
          </table:table-cell>
          <table:table-cell table:style-name="ce102" table:formula="of:=Costo_Fijo" office:value-type="float" office:value="45000" calcext:value-type="float">
            <text:p>45000.00</text:p>
          </table:table-cell>
          <table:table-cell table:style-name="ce102" table:formula="of:=Costo_Fijo" office:value-type="float" office:value="45000" calcext:value-type="float">
            <text:p>45000.00</text:p>
          </table:table-cell>
          <table:table-cell table:number-columns-repeated="16376"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44" office:value-type="string" office:string-value="Depreciaciones" calcext:value-type="string" table:number-columns-spanned="2" table:number-rows-spanned="1">
            <text:p><text:s/>Depreciaciones </text:p>
          </table:table-cell>
          <table:covered-table-cell table:style-name="ce66"/>
          <table:table-cell table:style-name="ce102" table:formula="of:=[.$D$16]/[.$D$18]" office:value-type="float" office:value="20000" calcext:value-type="float">
            <text:p>20000.00</text:p>
          </table:table-cell>
          <table:table-cell table:style-name="ce102" table:formula="of:=[.$D$16]/[.$D$18]" office:value-type="float" office:value="20000" calcext:value-type="float">
            <text:p>20000.00</text:p>
          </table:table-cell>
          <table:table-cell table:style-name="ce102" table:formula="of:=[.$D$16]/[.$D$18]" office:value-type="float" office:value="20000" calcext:value-type="float">
            <text:p>20000.00</text:p>
          </table:table-cell>
          <table:table-cell table:style-name="ce102" table:formula="of:=[.$D$16]/[.$D$18]" office:value-type="float" office:value="20000" calcext:value-type="float">
            <text:p>20000.00</text:p>
          </table:table-cell>
          <table:table-cell table:style-name="ce172" table:formula="of:=[.$D$16]/[.$D$18]" office:value-type="float" office:value="20000" calcext:value-type="float">
            <text:p>20000.00</text:p>
          </table:table-cell>
          <table:table-cell table:number-columns-repeated="16376"/>
        </table:table-row>
        <table:table-row table:style-name="ro1">
          <table:table-cell/>
          <table:table-cell table:style-name="ce45" office:value-type="string" office:string-value="Utilidad Imponible" calcext:value-type="string" table:number-columns-spanned="2" table:number-rows-spanned="1">
            <text:p><text:s/>Utilidad Imponible </text:p>
          </table:table-cell>
          <table:covered-table-cell table:style-name="ce67"/>
          <table:table-cell table:style-name="ce103" table:formula="of:=[.D32]-[.D35]-[.D36]-[.D37]" office:value-type="float" office:value="7000" calcext:value-type="float">
            <text:p>7000.00</text:p>
          </table:table-cell>
          <table:table-cell table:style-name="ce103" table:formula="of:=[.E32]-[.E35]-[.E36]-[.E37]" office:value-type="float" office:value="12760" calcext:value-type="float">
            <text:p>12760.00</text:p>
          </table:table-cell>
          <table:table-cell table:style-name="ce103" table:formula="of:=[.F32]-[.F35]-[.F36]-[.F37]" office:value-type="float" office:value="18980.8" calcext:value-type="float">
            <text:p>18980.80</text:p>
          </table:table-cell>
          <table:table-cell table:style-name="ce103" table:formula="of:=[.G32]-[.G35]-[.G36]-[.G37]" office:value-type="float" office:value="25699.264" calcext:value-type="float">
            <text:p>25699.26</text:p>
          </table:table-cell>
          <table:table-cell table:style-name="ce173" table:formula="of:=[.H32]-[.H35]-[.H36]-[.H37]" office:value-type="float" office:value="32955.20512" calcext:value-type="float">
            <text:p>32955.21</text:p>
          </table:table-cell>
          <table:table-cell table:number-columns-repeated="16376"/>
        </table:table-row>
        <table:table-row table:style-name="ro1">
          <table:table-cell/>
          <table:table-cell table:style-name="ce42" office:value-type="string" office:string-value="Impuestos" calcext:value-type="string" table:number-columns-spanned="2" table:number-rows-spanned="1">
            <text:p><text:s/>Impuestos </text:p>
          </table:table-cell>
          <table:covered-table-cell table:style-name="ce68"/>
          <table:table-cell table:style-name="ce102" table:formula="of:=[.D38]*[.$D$26]" office:value-type="float" office:value="2065" calcext:value-type="float">
            <text:p>2065.00</text:p>
          </table:table-cell>
          <table:table-cell table:style-name="ce102" table:formula="of:=[.E38]*[.$D$26]" office:value-type="float" office:value="3764.2" calcext:value-type="float">
            <text:p>3764.20</text:p>
          </table:table-cell>
          <table:table-cell table:style-name="ce102" table:formula="of:=[.F38]*[.$D$26]" office:value-type="float" office:value="5599.336" calcext:value-type="float">
            <text:p>5599.34</text:p>
          </table:table-cell>
          <table:table-cell table:style-name="ce102" table:formula="of:=[.G38]*[.$D$26]" office:value-type="float" office:value="7581.28288" calcext:value-type="float">
            <text:p>7581.28</text:p>
          </table:table-cell>
          <table:table-cell table:style-name="ce172" table:formula="of:=[.H38]*[.$D$26]" office:value-type="float" office:value="9721.7855104" calcext:value-type="float">
            <text:p>9721.79</text:p>
          </table:table-cell>
          <table:table-cell table:number-columns-repeated="16376"/>
        </table:table-row>
        <table:table-row table:style-name="ro1">
          <table:table-cell/>
          <table:table-cell table:style-name="ce46" office:value-type="string" office:string-value="Utilidad Neta" calcext:value-type="string" table:number-columns-spanned="2" table:number-rows-spanned="1">
            <text:p><text:s/>Utilidad Neta </text:p>
          </table:table-cell>
          <table:covered-table-cell table:style-name="ce69"/>
          <table:table-cell table:style-name="ce104" table:formula="of:=[.D38]-[.D39]" office:value-type="float" office:value="4935" calcext:value-type="float">
            <text:p>4935.00</text:p>
          </table:table-cell>
          <table:table-cell table:style-name="ce104" table:formula="of:=[.E38]-[.E39]" office:value-type="float" office:value="8995.8" calcext:value-type="float">
            <text:p>8995.80</text:p>
          </table:table-cell>
          <table:table-cell table:style-name="ce104" table:formula="of:=[.F38]-[.F39]" office:value-type="float" office:value="13381.464" calcext:value-type="float">
            <text:p>13381.46</text:p>
          </table:table-cell>
          <table:table-cell table:style-name="ce104" table:formula="of:=[.G38]-[.G39]" office:value-type="float" office:value="18117.98112" calcext:value-type="float">
            <text:p>18117.98</text:p>
          </table:table-cell>
          <table:table-cell table:style-name="ce174" table:formula="of:=[.H38]-[.H39]" office:value-type="float" office:value="23233.4196096" calcext:value-type="float">
            <text:p>23233.4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 table:number-columns-spanned="8" table:number-rows-spanned="1">
            <text:p>FLUJO DE CAJA ECONÓMICO PROYECTADO</text:p>
          </table:table-cell>
          <table:covered-table-cell table:number-columns-repeated="7" table:style-name="ce6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7" office:value-type="string" calcext:value-type="string" table:number-columns-spanned="2" table:number-rows-spanned="1">
            <text:p>RUBRO</text:p>
          </table:table-cell>
          <table:covered-table-cell table:style-name="ce70"/>
          <table:table-cell table:style-name="ce105" office:value-type="float" office:value="0" calcext:value-type="float">
            <text:p>0</text:p>
          </table:table-cell>
          <table:table-cell table:style-name="ce105" table:formula="of:=[.D44]+1" office:value-type="float" office:value="1" calcext:value-type="float">
            <text:p>1</text:p>
          </table:table-cell>
          <table:table-cell table:style-name="ce105" table:formula="of:=[.E44]+1" office:value-type="float" office:value="2" calcext:value-type="float">
            <text:p>2</text:p>
          </table:table-cell>
          <table:table-cell table:style-name="ce105" table:formula="of:=[.F44]+1" office:value-type="float" office:value="3" calcext:value-type="float">
            <text:p>3</text:p>
          </table:table-cell>
          <table:table-cell table:style-name="ce105" table:formula="of:=[.G44]+1" office:value-type="float" office:value="4" calcext:value-type="float">
            <text:p>4</text:p>
          </table:table-cell>
          <table:table-cell table:style-name="ce178" table:formula="of:=[.H44]+1" office:value-type="float" office:value="5" calcext:value-type="float">
            <text:p>5</text:p>
          </table:table-cell>
          <table:table-cell table:number-columns-repeated="2"/>
          <table:table-cell table:style-name="ce188" office:value-type="string" calcext:value-type="string">
            <text:p>Rubros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INGRESOS</text:p>
          </table:table-cell>
          <table:covered-table-cell table:style-name="ce71"/>
          <table:table-cell table:style-name="ce106" table:formula="of:=[.D46]+[.D47]" office:value-type="float" office:value="0" calcext:value-type="float">
            <text:p>0.00</text:p>
          </table:table-cell>
          <table:table-cell table:style-name="ce134" table:formula="of:=[.E46]+[.E47]" office:value-type="float" office:value="90000" calcext:value-type="float">
            <text:p>90000.00</text:p>
          </table:table-cell>
          <table:table-cell table:style-name="ce134" table:formula="of:=[.F46]+[.F47]" office:value-type="float" office:value="97200" calcext:value-type="float">
            <text:p>97200.00</text:p>
          </table:table-cell>
          <table:table-cell table:style-name="ce134" table:formula="of:=[.G46]+[.G47]" office:value-type="float" office:value="104976" calcext:value-type="float">
            <text:p>104976.00</text:p>
          </table:table-cell>
          <table:table-cell table:style-name="ce134" table:formula="of:=[.H46]+[.H47]" office:value-type="float" office:value="113374.08" calcext:value-type="float">
            <text:p>113374.08</text:p>
          </table:table-cell>
          <table:table-cell table:style-name="ce179" table:formula="of:=[.I46]+[.I47]" office:value-type="float" office:value="142444.0064" calcext:value-type="float">
            <text:p>142444.01</text:p>
          </table:table-cell>
          <table:table-cell/>
          <table:table-cell table:style-name="ce33" office:value-type="string" calcext:value-type="string">
            <text:p>-</text:p>
          </table:table-cell>
          <table:table-cell office:value-type="string" calcext:value-type="string">
            <text:p>Activo Fijo</text:p>
          </table:table-cell>
          <table:table-cell table:style-name="ce192" table:formula="of:=-[.D16]" office:value-type="float" office:value="-100000" calcext:value-type="float">
            <text:p>-100000.0</text:p>
          </table:table-cell>
          <table:table-cell table:style-name="ce192" table:number-columns-repeated="5"/>
          <table:table-cell table:number-columns-repeated="16366"/>
        </table:table-row>
        <table:table-row table:style-name="ro1">
          <table:table-cell/>
          <table:table-cell table:style-name="ce49" office:value-type="string" calcext:value-type="string" table:number-columns-spanned="2" table:number-rows-spanned="1">
            <text:p>Ventas Netas</text:p>
          </table:table-cell>
          <table:covered-table-cell table:style-name="ce72"/>
          <table:table-cell table:style-name="ce107"/>
          <table:table-cell table:style-name="ce107" table:formula="of:=[.D32]" office:value-type="float" office:value="90000" calcext:value-type="float">
            <text:p>90000.00</text:p>
          </table:table-cell>
          <table:table-cell table:style-name="ce107" table:formula="of:=[.E32]" office:value-type="float" office:value="97200" calcext:value-type="float">
            <text:p>97200.00</text:p>
          </table:table-cell>
          <table:table-cell table:style-name="ce107" table:formula="of:=[.F32]" office:value-type="float" office:value="104976" calcext:value-type="float">
            <text:p>104976.00</text:p>
          </table:table-cell>
          <table:table-cell table:style-name="ce107" table:formula="of:=[.G32]" office:value-type="float" office:value="113374.08" calcext:value-type="float">
            <text:p>113374.08</text:p>
          </table:table-cell>
          <table:table-cell table:style-name="ce180" table:formula="of:=[.H32]" office:value-type="float" office:value="122444.0064" calcext:value-type="float">
            <text:p>122444.01</text:p>
          </table:table-cell>
          <table:table-cell/>
          <table:table-cell table:style-name="ce33" office:value-type="string" calcext:value-type="string">
            <text:p>-</text:p>
          </table:table-cell>
          <table:table-cell office:value-type="string" calcext:value-type="string">
            <text:p>Capital de trabajo</text:p>
          </table:table-cell>
          <table:table-cell table:style-name="ce192" table:formula="of:=-[.D17]" office:value-type="float" office:value="-20000" calcext:value-type="float">
            <text:p>-20000.0</text:p>
          </table:table-cell>
          <table:table-cell table:style-name="ce192" table:number-columns-repeated="5"/>
          <table:table-cell table:number-columns-repeated="16366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Recupero KW</text:p>
          </table:table-cell>
          <table:covered-table-cell table:style-name="ce72"/>
          <table:table-cell table:style-name="ce107" table:number-columns-repeated="5"/>
          <table:table-cell table:style-name="ce180" table:formula="of:=[.D17]" office:value-type="float" office:value="20000" calcext:value-type="float">
            <text:p>20000.00</text:p>
          </table:table-cell>
          <table:table-cell table:number-columns-repeated="3"/>
          <table:table-cell table:style-name="ce192" table:number-columns-repeated="6"/>
          <table:table-cell table:number-columns-repeated="16366"/>
        </table:table-row>
        <table:table-row table:style-name="ro1">
          <table:table-cell/>
          <table:table-cell table:style-name="ce51" office:value-type="string" calcext:value-type="string" table:number-columns-spanned="2" table:number-rows-spanned="1">
            <text:p>EGRESOS</text:p>
          </table:table-cell>
          <table:covered-table-cell table:style-name="ce73"/>
          <table:table-cell table:style-name="ce107" table:formula="of:=SUM([.D49:.D52])" office:value-type="float" office:value="-120000" calcext:value-type="float">
            <text:p>-120000.00</text:p>
          </table:table-cell>
          <table:table-cell table:style-name="ce107" table:formula="of:=SUM([.E49:.E52])" office:value-type="float" office:value="-65065" calcext:value-type="float">
            <text:p>-65065.00</text:p>
          </table:table-cell>
          <table:table-cell table:style-name="ce107" table:formula="of:=SUM([.F49:.F52])" office:value-type="float" office:value="-68204.2" calcext:value-type="float">
            <text:p>-68204.20</text:p>
          </table:table-cell>
          <table:table-cell table:style-name="ce107" table:formula="of:=SUM([.G49:.G52])" office:value-type="float" office:value="-71594.536" calcext:value-type="float">
            <text:p>-71594.54</text:p>
          </table:table-cell>
          <table:table-cell table:style-name="ce107" table:formula="of:=SUM([.H49:.H52])" office:value-type="float" office:value="-75256.09888" calcext:value-type="float">
            <text:p>-75256.10</text:p>
          </table:table-cell>
          <table:table-cell table:style-name="ce180" table:formula="of:=SUM([.I49:.I52])" office:value-type="float" office:value="-79210.5867904" calcext:value-type="float">
            <text:p>-79210.59</text:p>
          </table:table-cell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Valor recupero Capital de Trabajo</text:p>
          </table:table-cell>
          <table:table-cell/>
          <table:table-cell table:style-name="ce192" table:number-columns-repeated="4"/>
          <table:table-cell table:style-name="ce192" table:formula="of:=-SUM([.M46:.R46])" office:value-type="float" office:value="20000" calcext:value-type="float">
            <text:p>20000.0</text:p>
          </table:table-cell>
          <table:table-cell table:number-columns-repeated="16366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Inversión</text:p>
          </table:table-cell>
          <table:covered-table-cell table:style-name="ce72"/>
          <table:table-cell table:style-name="ce107" table:formula="of:=-([.D16]+[.D17])" office:value-type="float" office:value="-120000" calcext:value-type="float">
            <text:p>-120000.00</text:p>
          </table:table-cell>
          <table:table-cell table:style-name="ce107" table:number-columns-repeated="4"/>
          <table:table-cell table:style-name="ce180"/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Valor de recupero de Terreno</text:p>
          </table:table-cell>
          <table:table-cell table:style-name="ce192" table:number-columns-repeated="6"/>
          <table:table-cell table:number-columns-repeated="16366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Costo Variable Total</text:p>
          </table:table-cell>
          <table:covered-table-cell table:style-name="ce72"/>
          <table:table-cell table:style-name="ce107"/>
          <table:table-cell table:style-name="ce107" table:formula="of:=-[.D35]" office:value-type="float" office:value="-18000" calcext:value-type="float">
            <text:p>-18000.00</text:p>
          </table:table-cell>
          <table:table-cell table:style-name="ce107" table:formula="of:=-[.E35]" office:value-type="float" office:value="-19440" calcext:value-type="float">
            <text:p>-19440.00</text:p>
          </table:table-cell>
          <table:table-cell table:style-name="ce107" table:formula="of:=-[.F35]" office:value-type="float" office:value="-20995.2" calcext:value-type="float">
            <text:p>-20995.20</text:p>
          </table:table-cell>
          <table:table-cell table:style-name="ce107" table:formula="of:=-[.G35]" office:value-type="float" office:value="-22674.816" calcext:value-type="float">
            <text:p>-22674.82</text:p>
          </table:table-cell>
          <table:table-cell table:style-name="ce180" table:formula="of:=-[.H35]" office:value-type="float" office:value="-24488.80128" calcext:value-type="float">
            <text:p>-24488.80</text:p>
          </table:table-cell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Valor de recupero de Activo Fijo (vr)</text:p>
          </table:table-cell>
          <table:table-cell table:style-name="ce192" table:number-columns-repeated="6"/>
          <table:table-cell table:number-columns-repeated="16366"/>
        </table:table-row>
        <table:table-row table:style-name="ro2">
          <table:table-cell/>
          <table:table-cell table:style-name="ce50" office:value-type="string" calcext:value-type="string" table:number-columns-spanned="2" table:number-rows-spanned="1">
            <text:p>Costo Fijo Total</text:p>
          </table:table-cell>
          <table:covered-table-cell table:style-name="ce72"/>
          <table:table-cell table:style-name="ce107"/>
          <table:table-cell table:style-name="ce107" table:formula="of:=-[.D36]" office:value-type="float" office:value="-45000" calcext:value-type="float">
            <text:p>-45000.00</text:p>
          </table:table-cell>
          <table:table-cell table:style-name="ce107" table:formula="of:=-[.E36]" office:value-type="float" office:value="-45000" calcext:value-type="float">
            <text:p>-45000.00</text:p>
          </table:table-cell>
          <table:table-cell table:style-name="ce107" table:formula="of:=-[.F36]" office:value-type="float" office:value="-45000" calcext:value-type="float">
            <text:p>-45000.00</text:p>
          </table:table-cell>
          <table:table-cell table:style-name="ce107" table:formula="of:=-[.G36]" office:value-type="float" office:value="-45000" calcext:value-type="float">
            <text:p>-45000.00</text:p>
          </table:table-cell>
          <table:table-cell table:style-name="ce180" table:formula="of:=-[.H36]" office:value-type="float" office:value="-45000" calcext:value-type="float">
            <text:p>-45000.00</text:p>
          </table:table-cell>
          <table:table-cell table:number-columns-repeated="2"/>
          <table:table-cell table:style-name="ce189" office:value-type="string" calcext:value-type="string">
            <text:p>Flujo de inversion <text:s/>y Liquidación</text:p>
          </table:table-cell>
          <table:table-cell table:style-name="ce193" table:formula="of:=SUM([.M45:.M50])" office:value-type="float" office:value="-120000" calcext:value-type="float">
            <text:p>-120000.0</text:p>
          </table:table-cell>
          <table:table-cell table:style-name="ce193" table:formula="of:=SUM([.N45:.N50])" office:value-type="float" office:value="0" calcext:value-type="float">
            <text:p>0.0</text:p>
          </table:table-cell>
          <table:table-cell table:style-name="ce193" table:formula="of:=SUM([.O45:.O50])" office:value-type="float" office:value="0" calcext:value-type="float">
            <text:p>0.0</text:p>
          </table:table-cell>
          <table:table-cell table:style-name="ce193" table:formula="of:=SUM([.P45:.P50])" office:value-type="float" office:value="0" calcext:value-type="float">
            <text:p>0.0</text:p>
          </table:table-cell>
          <table:table-cell table:style-name="ce193" table:formula="of:=SUM([.Q45:.Q50])" office:value-type="float" office:value="0" calcext:value-type="float">
            <text:p>0.0</text:p>
          </table:table-cell>
          <table:table-cell table:style-name="ce193" table:formula="of:=SUM([.R45:.R50])" office:value-type="float" office:value="20000" calcext:value-type="float">
            <text:p>20000.0</text:p>
          </table:table-cell>
          <table:table-cell table:number-columns-repeated="16366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Impuestos</text:p>
          </table:table-cell>
          <table:covered-table-cell table:style-name="ce74"/>
          <table:table-cell table:style-name="ce108"/>
          <table:table-cell table:style-name="ce108" table:formula="of:=-[.D39]" office:value-type="float" office:value="-2065" calcext:value-type="float">
            <text:p>-2065.00</text:p>
          </table:table-cell>
          <table:table-cell table:style-name="ce108" table:formula="of:=-[.E39]" office:value-type="float" office:value="-3764.2" calcext:value-type="float">
            <text:p>-3764.20</text:p>
          </table:table-cell>
          <table:table-cell table:style-name="ce108" table:formula="of:=-[.F39]" office:value-type="float" office:value="-5599.336" calcext:value-type="float">
            <text:p>-5599.34</text:p>
          </table:table-cell>
          <table:table-cell table:style-name="ce108" table:formula="of:=-[.G39]" office:value-type="float" office:value="-7581.28288" calcext:value-type="float">
            <text:p>-7581.28</text:p>
          </table:table-cell>
          <table:table-cell table:style-name="ce181" table:formula="of:=-[.H39]" office:value-type="float" office:value="-9721.7855104" calcext:value-type="float">
            <text:p>-9721.79</text:p>
          </table:table-cell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Ingreso en efectivo</text:p>
          </table:table-cell>
          <table:table-cell table:style-name="ce192"/>
          <table:table-cell table:style-name="ce192" table:formula="of:=[.D32]" office:value-type="float" office:value="90000" calcext:value-type="float">
            <text:p>90000.0</text:p>
          </table:table-cell>
          <table:table-cell table:style-name="ce192" table:formula="of:=[.E32]" office:value-type="float" office:value="97200" calcext:value-type="float">
            <text:p>97200.0</text:p>
          </table:table-cell>
          <table:table-cell table:style-name="ce192" table:formula="of:=[.F32]" office:value-type="float" office:value="104976" calcext:value-type="float">
            <text:p>104976.0</text:p>
          </table:table-cell>
          <table:table-cell table:style-name="ce192" table:formula="of:=[.G32]" office:value-type="float" office:value="113374.08" calcext:value-type="float">
            <text:p>113374.1</text:p>
          </table:table-cell>
          <table:table-cell table:style-name="ce192" table:formula="of:=[.H32]" office:value-type="float" office:value="122444.0064" calcext:value-type="float">
            <text:p>122444.0</text:p>
          </table:table-cell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Flujo de Caja Económico FCE</text:p>
          </table:table-cell>
          <table:covered-table-cell table:style-name="ce70"/>
          <table:table-cell table:style-name="ce109" table:formula="of:=[.D45]+[.D48]" office:value-type="float" office:value="-120000" calcext:value-type="float">
            <text:p>-120000.00</text:p>
          </table:table-cell>
          <table:table-cell table:style-name="ce109" table:formula="of:=[.E45]+[.E48]" office:value-type="float" office:value="24935" calcext:value-type="float">
            <text:p>24935.00</text:p>
          </table:table-cell>
          <table:table-cell table:style-name="ce109" table:formula="of:=[.F45]+[.F48]" office:value-type="float" office:value="28995.8" calcext:value-type="float">
            <text:p>28995.80</text:p>
          </table:table-cell>
          <table:table-cell table:style-name="ce109" table:formula="of:=[.G45]+[.G48]" office:value-type="float" office:value="33381.464" calcext:value-type="float">
            <text:p>33381.46</text:p>
          </table:table-cell>
          <table:table-cell table:style-name="ce109" table:formula="of:=[.H45]+[.H48]" office:value-type="float" office:value="38117.98112" calcext:value-type="float">
            <text:p>38117.98</text:p>
          </table:table-cell>
          <table:table-cell table:style-name="ce182" table:formula="of:=[.I45]+[.I48]" office:value-type="float" office:value="63233.4196096" calcext:value-type="float">
            <text:p>63233.42</text:p>
          </table:table-cell>
          <table:table-cell/>
          <table:table-cell table:style-name="ce33" office:value-type="string" calcext:value-type="string">
            <text:p>-</text:p>
          </table:table-cell>
          <table:table-cell office:value-type="string" calcext:value-type="string">
            <text:p>Costos fijos</text:p>
          </table:table-cell>
          <table:table-cell table:style-name="ce192"/>
          <table:table-cell table:style-name="ce192" table:formula="of:=-[.D36]" office:value-type="float" office:value="-45000" calcext:value-type="float">
            <text:p>-45000.0</text:p>
          </table:table-cell>
          <table:table-cell table:style-name="ce192" table:formula="of:=-[.E36]" office:value-type="float" office:value="-45000" calcext:value-type="float">
            <text:p>-45000.0</text:p>
          </table:table-cell>
          <table:table-cell table:style-name="ce192" table:formula="of:=-[.F36]" office:value-type="float" office:value="-45000" calcext:value-type="float">
            <text:p>-45000.0</text:p>
          </table:table-cell>
          <table:table-cell table:style-name="ce192" table:formula="of:=-[.G36]" office:value-type="float" office:value="-45000" calcext:value-type="float">
            <text:p>-45000.0</text:p>
          </table:table-cell>
          <table:table-cell table:style-name="ce192" table:formula="of:=-[.H36]" office:value-type="float" office:value="-45000" calcext:value-type="float">
            <text:p>-45000.0</text:p>
          </table:table-cell>
          <table:table-cell table:number-columns-repeated="16366"/>
        </table:table-row>
        <table:table-row table:style-name="ro1">
          <table:table-cell table:number-columns-repeated="10"/>
          <table:table-cell table:style-name="ce33" office:value-type="string" calcext:value-type="string">
            <text:p>-</text:p>
          </table:table-cell>
          <table:table-cell office:value-type="string" calcext:value-type="string">
            <text:p>Costos variables</text:p>
          </table:table-cell>
          <table:table-cell table:style-name="ce192"/>
          <table:table-cell table:style-name="ce192" table:formula="of:=-[.D35]" office:value-type="float" office:value="-18000" calcext:value-type="float">
            <text:p>-18000.0</text:p>
          </table:table-cell>
          <table:table-cell table:style-name="ce192" table:formula="of:=-[.E35]" office:value-type="float" office:value="-19440" calcext:value-type="float">
            <text:p>-19440.0</text:p>
          </table:table-cell>
          <table:table-cell table:style-name="ce192" table:formula="of:=-[.F35]" office:value-type="float" office:value="-20995.2" calcext:value-type="float">
            <text:p>-20995.2</text:p>
          </table:table-cell>
          <table:table-cell table:style-name="ce192" table:formula="of:=-[.G35]" office:value-type="float" office:value="-22674.816" calcext:value-type="float">
            <text:p>-22674.8</text:p>
          </table:table-cell>
          <table:table-cell table:style-name="ce192" table:formula="of:=-[.H35]" office:value-type="float" office:value="-24488.80128" calcext:value-type="float">
            <text:p>-24488.8</text:p>
          </table:table-cell>
          <table:table-cell table:number-columns-repeated="16366"/>
        </table:table-row>
        <table:table-row table:style-name="ro1">
          <table:table-cell/>
          <table:table-cell table:style-name="ce53" office:value-type="string" calcext:value-type="string">
            <text:p>TIRE =</text:p>
          </table:table-cell>
          <table:table-cell table:style-name="ce75" table:formula="of:=IRR([.D53:.I53])" office:value-type="percentage" office:value="0.146321425066921" calcext:value-type="percentage">
            <text:p>14.63 %</text:p>
          </table:table-cell>
          <table:table-cell table:style-name="ce33" office:value-type="string" calcext:value-type="string">
            <text:p><text:s/>promedio anual</text:p>
          </table:table-cell>
          <table:table-cell table:number-columns-repeated="6"/>
          <table:table-cell table:style-name="ce33" office:value-type="string" calcext:value-type="string">
            <text:p>-</text:p>
          </table:table-cell>
          <table:table-cell office:value-type="string" calcext:value-type="string">
            <text:p>Impuestos y tibutos</text:p>
          </table:table-cell>
          <table:table-cell table:style-name="ce192"/>
          <table:table-cell table:style-name="ce192" table:formula="of:=-[.D39]" office:value-type="float" office:value="-2065" calcext:value-type="float">
            <text:p>-2065.0</text:p>
          </table:table-cell>
          <table:table-cell table:style-name="ce192" table:formula="of:=-[.E39]" office:value-type="float" office:value="-3764.2" calcext:value-type="float">
            <text:p>-3764.2</text:p>
          </table:table-cell>
          <table:table-cell table:style-name="ce192" table:formula="of:=-[.F39]" office:value-type="float" office:value="-5599.336" calcext:value-type="float">
            <text:p>-5599.3</text:p>
          </table:table-cell>
          <table:table-cell table:style-name="ce192" table:formula="of:=-[.G39]" office:value-type="float" office:value="-7581.28288" calcext:value-type="float">
            <text:p>-7581.3</text:p>
          </table:table-cell>
          <table:table-cell table:style-name="ce192" table:formula="of:=-[.H39]" office:value-type="float" office:value="-9721.7855104" calcext:value-type="float">
            <text:p>-9721.8</text:p>
          </table:table-cell>
          <table:table-cell table:number-columns-repeated="16366"/>
        </table:table-row>
        <table:table-row table:style-name="ro2">
          <table:table-cell/>
          <table:table-cell table:style-name="ce53" office:value-type="string" calcext:value-type="string">
            <text:p>VANE=</text:p>
          </table:table-cell>
          <table:table-cell table:style-name="ce76" table:formula="of:=NPV([.D27];[.E53:.I53])+INVERSIÓN" office:value-type="float" office:value="17009.7134333844" calcext:value-type="float">
            <text:p><text:s/>17,010 </text:p>
          </table:table-cell>
          <table:table-cell table:style-name="ce33" office:value-type="string" calcext:value-type="string">
            <text:p><text:s/>soles</text:p>
          </table:table-cell>
          <table:table-cell table:number-columns-repeated="7"/>
          <table:table-cell table:style-name="ce189" office:value-type="string" calcext:value-type="string">
            <text:p>Flujo de caja operativo</text:p>
          </table:table-cell>
          <table:table-cell table:style-name="ce193"/>
          <table:table-cell table:style-name="ce193" table:formula="of:=SUM([.N52:.N55])" office:value-type="float" office:value="24935" calcext:value-type="float">
            <text:p>24935.0</text:p>
          </table:table-cell>
          <table:table-cell table:style-name="ce193" table:formula="of:=SUM([.O52:.O55])" office:value-type="float" office:value="28995.8" calcext:value-type="float">
            <text:p>28995.8</text:p>
          </table:table-cell>
          <table:table-cell table:style-name="ce193" table:formula="of:=SUM([.P52:.P55])" office:value-type="float" office:value="33381.464" calcext:value-type="float">
            <text:p>33381.5</text:p>
          </table:table-cell>
          <table:table-cell table:style-name="ce193" table:formula="of:=SUM([.Q52:.Q55])" office:value-type="float" office:value="38117.98112" calcext:value-type="float">
            <text:p>38118.0</text:p>
          </table:table-cell>
          <table:table-cell table:style-name="ce193" table:formula="of:=SUM([.R52:.R55])" office:value-type="float" office:value="43233.4196096" calcext:value-type="float">
            <text:p>43233.4</text:p>
          </table:table-cell>
          <table:table-cell table:number-columns-repeated="16366"/>
        </table:table-row>
        <table:table-row table:style-name="ro2">
          <table:table-cell/>
          <table:table-cell table:style-name="ce54" office:value-type="string" calcext:value-type="string">
            <text:p>PEC =</text:p>
          </table:table-cell>
          <table:table-cell table:style-name="ce53" table:formula="of:=Costo_Fijo/(Precio-[.D24])" office:value-type="float" office:value="6250" calcext:value-type="float">
            <text:p>6250</text:p>
          </table:table-cell>
          <table:table-cell table:style-name="ce33" office:value-type="string" calcext:value-type="string">
            <text:p>unidades/periodo</text:p>
          </table:table-cell>
          <table:table-cell table:number-columns-repeated="7"/>
          <table:table-cell table:style-name="ce190" office:value-type="string" calcext:value-type="string">
            <text:p>FLUJO DE CAJA ECONOMICO (FCE)</text:p>
          </table:table-cell>
          <table:table-cell table:style-name="ce194" table:formula="of:=[.M51]+[.M56]" office:value-type="float" office:value="-120000" calcext:value-type="float">
            <text:p>-120000.0</text:p>
          </table:table-cell>
          <table:table-cell table:style-name="ce194" table:formula="of:=[.N51]+[.N56]" office:value-type="float" office:value="24935" calcext:value-type="float">
            <text:p>24935.0</text:p>
          </table:table-cell>
          <table:table-cell table:style-name="ce194" table:formula="of:=[.O51]+[.O56]" office:value-type="float" office:value="28995.8" calcext:value-type="float">
            <text:p>28995.8</text:p>
          </table:table-cell>
          <table:table-cell table:style-name="ce194" table:formula="of:=[.P51]+[.P56]" office:value-type="float" office:value="33381.464" calcext:value-type="float">
            <text:p>33381.5</text:p>
          </table:table-cell>
          <table:table-cell table:style-name="ce194" table:formula="of:=[.Q51]+[.Q56]" office:value-type="float" office:value="38117.98112" calcext:value-type="float">
            <text:p>38118.0</text:p>
          </table:table-cell>
          <table:table-cell table:style-name="ce194" table:formula="of:=[.R51]+[.R56]" office:value-type="float" office:value="63233.4196096" calcext:value-type="float">
            <text:p>63233.4</text:p>
          </table:table-cell>
          <table:table-cell table:number-columns-repeated="16366"/>
        </table:table-row>
        <table:table-row table:style-name="ro1">
          <table:table-cell/>
          <table:table-cell table:style-name="ce55"/>
          <table:table-cell table:style-name="ce77"/>
          <table:table-cell table:style-name="ce33"/>
          <table:table-cell table:number-columns-repeated="16380"/>
        </table:table-row>
        <table:table-row table:style-name="ro1">
          <table:table-cell/>
          <table:table-cell table:style-name="ce56" office:value-type="string" calcext:value-type="string">
            <text:p>ANALISIS DE SENSIBILIDAD</text:p>
          </table:table-cell>
          <table:table-cell table:style-name="ce78"/>
          <table:table-cell table:number-columns-repeated="16381"/>
        </table:table-row>
        <table:table-row table:style-name="ro1">
          <table:table-cell/>
          <table:table-cell table:style-name="ce57" office:value-type="string" calcext:value-type="string">
            <text:p>1.- ANALISIS DE PUNTOS CRÍTICOS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79" office:value-type="string" calcext:value-type="string">
            <text:p>¿Qué <text:span text:style-name="T3">precio</text:span><text:span text:style-name="T4"> debe tener el producto para que el VANE = 0?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9"/>
          <table:table-cell table:number-columns-repeated="8"/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Va</text:p>
          </table:table-cell>
          <table:table-cell table:style-name="ce33" office:value-type="string" calcext:value-type="string">
            <text:p>Vm</text:p>
          </table:table-cell>
          <table:table-cell table:style-name="ce33" office:value-type="string" calcext:value-type="string">
            <text:p>Sporte</text:p>
          </table:table-cell>
          <table:table-cell table:style-name="ce33" office:value-type="string" calcext:value-type="string">
            <text:p>Clasificación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80" office:value-type="string" calcext:value-type="string">
            <text:p>Variable</text:p>
          </table:table-cell>
          <table:table-cell table:style-name="ce80" office:value-type="string" calcext:value-type="string">
            <text:p>Valor Actual</text:p>
          </table:table-cell>
          <table:table-cell table:style-name="ce80" office:value-type="string" calcext:value-type="string">
            <text:p>Valor Marginal</text:p>
          </table:table-cell>
          <table:table-cell table:style-name="ce80" office:value-type="string" calcext:value-type="string">
            <text:p><text:s/>Soporte %</text:p>
          </table:table-cell>
          <table:table-cell table:style-name="ce160" office:value-type="string" calcext:value-type="string">
            <text:p>Clasificación</text:p>
          </table:table-cell>
          <table:table-cell table:number-columns-repeated="4"/>
          <table:table-cell table:style-name="ce33" office:value-type="string" calcext:value-type="string">
            <text:p>precio</text:p>
          </table:table-cell>
          <table:table-cell table:style-name="ce91" table:formula="of:=Precio" office:value-type="float" office:value="9" calcext:value-type="float">
            <text:p>9</text:p>
          </table:table-cell>
          <table:table-cell table:style-name="ce91" table:number-columns-repeated="3"/>
          <table:table-cell table:number-columns-repeated="16368"/>
        </table:table-row>
        <table:table-row table:style-name="ro1">
          <table:table-cell table:number-columns-repeated="2"/>
          <table:table-cell table:style-name="ce81" office:value-type="string" calcext:value-type="string">
            <text:p>Precio </text:p>
          </table:table-cell>
          <table:table-cell table:style-name="ce110" table:formula="of:=Precio" office:value-type="float" office:value="9" calcext:value-type="float">
            <text:p>9</text:p>
          </table:table-cell>
          <table:table-cell table:style-name="ce110" office:value-type="float" office:value="8.45" calcext:value-type="float">
            <text:p>8.45</text:p>
          </table:table-cell>
          <table:table-cell table:style-name="ce149" table:formula="of:=([.E64]-[.D64])/[.D64]" office:value-type="percentage" office:value="-0.0611111111111112" calcext:value-type="percentage">
            <text:p>-6.1%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4"/>
          <table:table-cell table:style-name="ce33" office:value-type="string" calcext:value-type="string">
            <text:p>tasa</text:p>
          </table:table-cell>
          <table:table-cell table:style-name="ce195" table:formula="of:=Tasa" office:value-type="percentage" office:value="0.08" calcext:value-type="percentage">
            <text:p>8.00 %</text:p>
          </table:table-cell>
          <table:table-cell table:style-name="ce91" table:number-columns-repeated="3"/>
          <table:table-cell table:number-columns-repeated="16368"/>
        </table:table-row>
        <table:table-row table:style-name="ro1">
          <table:table-cell table:number-columns-repeated="2"/>
          <table:table-cell table:style-name="ce82" office:value-type="string" calcext:value-type="string">
            <text:p>Tasa Crec.</text:p>
          </table:table-cell>
          <table:table-cell table:style-name="ce111" table:formula="of:=Tasa" office:value-type="percentage" office:value="0.08" calcext:value-type="percentage">
            <text:p>8 %</text:p>
          </table:table-cell>
          <table:table-cell table:style-name="ce135" office:value-type="percentage" office:value="0.0362" calcext:value-type="percentage">
            <text:p>3.62 %</text:p>
          </table:table-cell>
          <table:table-cell table:style-name="ce149" table:formula="of:=([.E65]-[.D65])/[.D65]" office:value-type="percentage" office:value="-0.5475" calcext:value-type="percentage">
            <text:p>-54.8%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4"/>
          <table:table-cell table:style-name="ce33" office:value-type="string" calcext:value-type="string">
            <text:p>precio mp</text:p>
          </table:table-cell>
          <table:table-cell table:style-name="ce91" table:formula="of:=Materia_Prima" office:value-type="float" office:value="1.2" calcext:value-type="float">
            <text:p>1.2</text:p>
          </table:table-cell>
          <table:table-cell table:style-name="ce91" table:number-columns-repeated="3"/>
          <table:table-cell table:number-columns-repeated="16368"/>
        </table:table-row>
        <table:table-row table:style-name="ro1">
          <table:table-cell table:number-columns-repeated="2"/>
          <table:table-cell table:style-name="ce82" office:value-type="string" calcext:value-type="string">
            <text:p>Precio MP</text:p>
          </table:table-cell>
          <table:table-cell table:style-name="ce110" table:formula="of:=Materia_Prima" office:value-type="float" office:value="1.2" calcext:value-type="float">
            <text:p>1.2</text:p>
          </table:table-cell>
          <table:table-cell table:style-name="ce110" office:value-type="float" office:value="1.75" calcext:value-type="float">
            <text:p>1.75</text:p>
          </table:table-cell>
          <table:table-cell table:style-name="ce149" table:formula="of:=([.E66]-[.D66])/[.D66]" office:value-type="percentage" office:value="0.458333333333333" calcext:value-type="percentage">
            <text:p>45.8%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4"/>
          <table:table-cell table:style-name="ce33" office:value-type="string" calcext:value-type="string">
            <text:p>costo mo</text:p>
          </table:table-cell>
          <table:table-cell table:style-name="ce91" table:formula="of:=Mano_de_Obra" office:value-type="float" office:value="0.6" calcext:value-type="float">
            <text:p>0.6</text:p>
          </table:table-cell>
          <table:table-cell table:style-name="ce91" table:number-columns-repeated="3"/>
          <table:table-cell table:number-columns-repeated="16368"/>
        </table:table-row>
        <table:table-row table:style-name="ro1">
          <table:table-cell table:number-columns-repeated="2"/>
          <table:table-cell table:style-name="ce53" office:value-type="string" calcext:value-type="string">
            <text:p>Costo MO</text:p>
          </table:table-cell>
          <table:table-cell table:style-name="ce110" table:formula="of:=[.D23]" office:value-type="float" office:value="0.6" calcext:value-type="float">
            <text:p>0.6</text:p>
          </table:table-cell>
          <table:table-cell table:style-name="ce110" office:value-type="float" office:value="1.15" calcext:value-type="float">
            <text:p>1.15</text:p>
          </table:table-cell>
          <table:table-cell table:style-name="ce149" table:formula="of:=([.E67]-[.D67])/[.D67]" office:value-type="percentage" office:value="0.916666666666667" calcext:value-type="percentage">
            <text:p>91.7%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o fijo</text:p>
          </table:table-cell>
          <table:table-cell table:style-name="ce90" table:formula="of:=Costo_Fijo" office:value-type="float" office:value="45000" calcext:value-type="float">
            <text:p>45,000</text:p>
          </table:table-cell>
          <table:table-cell table:style-name="ce91" table:number-columns-repeated="3"/>
          <table:table-cell table:number-columns-repeated="16368"/>
        </table:table-row>
        <table:table-row table:style-name="ro1">
          <table:table-cell table:number-columns-repeated="2"/>
          <table:table-cell table:style-name="ce81" office:value-type="string" calcext:value-type="string">
            <text:p>Costo Fijo</text:p>
          </table:table-cell>
          <table:table-cell table:style-name="ce112" table:formula="of:=Costo_Fijo" office:value-type="float" office:value="45000" calcext:value-type="float">
            <text:p>45,000</text:p>
          </table:table-cell>
          <table:table-cell table:style-name="ce110" office:value-type="float" office:value="51365" calcext:value-type="float">
            <text:p>51365</text:p>
          </table:table-cell>
          <table:table-cell table:style-name="ce149" table:formula="of:=([.E68]-[.D68])/[.D68]" office:value-type="percentage" office:value="0.141444444444444" calcext:value-type="percentage">
            <text:p>14.1%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7"/>
          <table:table-cell table:style-name="ce113" table:number-columns-repeated="2"/>
          <table:table-cell table:style-name="ce150"/>
          <table:table-cell table:number-columns-repeated="16378"/>
        </table:table-row>
        <table:table-row table:style-name="ro1">
          <table:table-cell/>
          <table:table-cell table:style-name="ce58" office:value-type="string" calcext:value-type="string">
            <text:p>2.1.- ANALISIS DE SENSIBILIDAD UNIDIMENSIONAL</text:p>
          </table:table-cell>
          <table:table-cell table:number-columns-repeated="16382"/>
        </table:table-row>
        <table:table-row table:style-name="ro1">
          <table:table-cell table:style-name="ce34"/>
          <table:table-cell table:style-name="ce34" office:value-type="string" calcext:value-type="string">
            <text:p>A. PRECIO DEL PRODUCTO</text:p>
          </table:table-cell>
          <table:table-cell table:style-name="ce34"/>
          <table:table-cell table:number-columns-repeated="5"/>
          <table:table-cell table:style-name="ce34" office:value-type="string" calcext:value-type="string">
            <text:p>B. PRECIO MATERIA PRIMA</text:p>
          </table:table-cell>
          <table:table-cell table:style-name="ce34" table:number-columns-repeated="2"/>
          <table:table-cell table:number-columns-repeated="4"/>
          <table:table-cell table:style-name="ce34" office:value-type="string" calcext:value-type="string">
            <text:p>C. <text:s/>COSTO FIJO</text:p>
          </table:table-cell>
          <table:table-cell table:number-columns-repeated="5"/>
          <table:table-cell table:style-name="ce34" office:value-type="string" calcext:value-type="string">
            <text:p>D. TASA DE CRECIMIENTO</text:p>
          </table:table-cell>
          <table:table-cell table:number-columns-repeated="16362"/>
        </table:table-row>
        <table:table-row table:style-name="ro1">
          <table:table-cell/>
          <table:table-cell table:style-name="ce59" office:value-type="string" calcext:value-type="string">
            <text:p>¿ Cómo varia el VANE, TIRE y PEC al modificarse el precio del producto?</text:p>
          </table:table-cell>
          <table:table-cell table:style-name="ce83"/>
          <table:table-cell/>
          <table:table-cell table:style-name="ce59" table:number-columns-repeated="4"/>
          <table:table-cell table:style-name="ce59" office:value-type="string" calcext:value-type="string">
            <text:p>¿ Cómo varia el VANE, TIRE y PEC al modificarse el precio de la materia prima?</text:p>
          </table:table-cell>
          <table:table-cell table:number-columns-repeated="6"/>
          <table:table-cell table:style-name="ce59" office:value-type="string" calcext:value-type="string">
            <text:p>¿ Cómo varia el VANE, TIRE y PEC al modificarse el costo fijo por periodo?</text:p>
          </table:table-cell>
          <table:table-cell table:number-columns-repeated="5"/>
          <table:table-cell table:style-name="ce59" office:value-type="string" calcext:value-type="string">
            <text:p>¿ Cómo varia el VANE, TIRE y PEC al modificarse la tasa de crecimiento?</text:p>
          </table:table-cell>
          <table:table-cell table:number-columns-repeated="16362"/>
        </table:table-row>
        <table:table-row table:style-name="ro1">
          <table:table-cell/>
          <table:table-cell table:style-name="ce33"/>
          <table:table-cell table:style-name="ce83"/>
          <table:table-cell/>
          <table:table-cell table:style-name="ce136" office:value-type="string" calcext:value-type="string" table:number-columns-spanned="3" table:number-rows-spanned="1">
            <text:p>RESULTADOS</text:p>
          </table:table-cell>
          <table:covered-table-cell table:number-columns-repeated="2" table:style-name="ce136"/>
          <table:table-cell/>
          <table:table-cell table:style-name="ce33"/>
          <table:table-cell table:number-columns-repeated="12"/>
          <table:table-cell table:style-name="ce201"/>
          <table:table-cell table:number-columns-repeated="16362"/>
        </table:table-row>
        <table:table-row table:style-name="ro1">
          <table:table-cell table:number-columns-repeated="3"/>
          <table:table-cell table:style-name="ce114"/>
          <table:table-cell table:style-name="ce114" office:value-type="string" calcext:value-type="string">
            <text:p>VANE</text:p>
          </table:table-cell>
          <table:table-cell table:style-name="ce114" office:value-type="string" calcext:value-type="string">
            <text:p>TIRE</text:p>
          </table:table-cell>
          <table:table-cell table:style-name="ce114" office:value-type="string" calcext:value-type="string">
            <text:p>PEC</text:p>
          </table:table-cell>
          <table:table-cell table:number-columns-repeated="3"/>
          <table:table-cell table:style-name="ce114"/>
          <table:table-cell table:style-name="ce114" office:value-type="string" calcext:value-type="string">
            <text:p>VAN</text:p>
          </table:table-cell>
          <table:table-cell table:style-name="ce114" office:value-type="string" calcext:value-type="string">
            <text:p>TIRE</text:p>
          </table:table-cell>
          <table:table-cell table:style-name="ce114" office:value-type="string" calcext:value-type="string">
            <text:p>PEC</text:p>
          </table:table-cell>
          <table:table-cell table:number-columns-repeated="2"/>
          <table:table-cell table:style-name="ce114"/>
          <table:table-cell table:style-name="ce114" office:value-type="string" calcext:value-type="string">
            <text:p>VAN</text:p>
          </table:table-cell>
          <table:table-cell table:style-name="ce114" office:value-type="string" calcext:value-type="string">
            <text:p>TIRE</text:p>
          </table:table-cell>
          <table:table-cell table:style-name="ce114" office:value-type="string" calcext:value-type="string">
            <text:p>PEC</text:p>
          </table:table-cell>
          <table:table-cell table:number-columns-repeated="2"/>
          <table:table-cell table:style-name="ce114" office:value-type="string" calcext:value-type="string">
            <text:p>TASA CREC.</text:p>
          </table:table-cell>
          <table:table-cell table:style-name="ce114" office:value-type="string" calcext:value-type="string">
            <text:p>VAN</text:p>
          </table:table-cell>
          <table:table-cell table:style-name="ce114" office:value-type="string" calcext:value-type="string">
            <text:p>TIRE</text:p>
          </table:table-cell>
          <table:table-cell table:style-name="ce114" office:value-type="string" calcext:value-type="string">
            <text:p>PEC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84" office:value-type="string" calcext:value-type="string" table:number-columns-spanned="1" table:number-rows-spanned="8">
            <text:p>PRECIO</text:p>
          </table:table-cell>
          <table:table-cell table:style-name="ce115" office:value-type="string" calcext:value-type="string">
            <text:p>BASE</text:p>
          </table:table-cell>
          <table:table-cell table:style-name="ce120" table:formula="of:=VAN" office:value-type="float" office:value="17009.7134333844" calcext:value-type="float">
            <text:p>17010</text:p>
          </table:table-cell>
          <table:table-cell table:style-name="ce151" table:formula="of:=TIR" office:value-type="percentage" office:value="0.146321425066921" calcext:value-type="percentage">
            <text:p>14.63 %</text:p>
          </table:table-cell>
          <table:table-cell table:style-name="ce161" table:formula="of:=PEC" office:value-type="float" office:value="6250" calcext:value-type="float">
            <text:p>6250</text:p>
          </table:table-cell>
          <table:table-cell table:number-columns-repeated="3"/>
          <table:table-cell table:style-name="ce115" office:value-type="string" calcext:value-type="string">
            <text:p>BASE</text:p>
          </table:table-cell>
          <table:table-cell table:style-name="ce120"/>
          <table:table-cell table:style-name="ce151"/>
          <table:table-cell table:style-name="ce115"/>
          <table:table-cell table:number-columns-repeated="2"/>
          <table:table-cell table:style-name="ce115" office:value-type="string" calcext:value-type="string">
            <text:p>BASE</text:p>
          </table:table-cell>
          <table:table-cell table:style-name="ce120"/>
          <table:table-cell table:style-name="ce151"/>
          <table:table-cell table:style-name="ce115"/>
          <table:table-cell table:number-columns-repeated="2"/>
          <table:table-cell table:style-name="ce115" office:value-type="string" calcext:value-type="string">
            <text:p>BASE</text:p>
          </table:table-cell>
          <table:table-cell table:style-name="ce120"/>
          <table:table-cell table:style-name="ce151"/>
          <table:table-cell table:style-name="ce115"/>
          <table:table-cell table:number-columns-repeated="16358"/>
        </table:table-row>
        <table:table-row table:style-name="ro1">
          <table:table-cell table:number-columns-repeated="2"/>
          <table:covered-table-cell table:style-name="ce85"/>
          <table:table-cell table:style-name="ce116" office:value-type="float" office:value="8.45" calcext:value-type="float">
            <text:p>8.45</text:p>
          </table:table-cell>
          <table:table-cell table:style-name="ce126" table:formula="of:=MULTIPLE.OPERATIONS([.E$75];[.$D$20];[.$D76])" office:value-type="float" office:value="14.0751818988792" calcext:value-type="float">
            <text:p>14</text:p>
          </table:table-cell>
          <table:table-cell table:style-name="ce152" table:formula="of:=MULTIPLE.OPERATIONS([.F$75];[.$D$20];[.$D76])" office:value-type="percentage" office:value="0.100039108362844" calcext:value-type="percentage">
            <text:p>10.00 %</text:p>
          </table:table-cell>
          <table:table-cell table:style-name="ce76" office:value-type="float" office:value="6766.91729323308" calcext:value-type="float">
            <text:p><text:s/>6,767 </text:p>
          </table:table-cell>
          <table:table-cell table:style-name="ce33"/>
          <table:table-cell table:number-columns-repeated="2"/>
          <table:table-cell table:style-name="ce185"/>
          <table:table-cell table:style-name="ce120"/>
          <table:table-cell table:style-name="ce196"/>
          <table:table-cell table:style-name="ce185"/>
          <table:table-cell table:number-columns-repeated="2"/>
          <table:table-cell table:style-name="ce185"/>
          <table:table-cell table:style-name="ce120"/>
          <table:table-cell table:style-name="ce151"/>
          <table:table-cell table:style-name="ce198"/>
          <table:table-cell/>
          <table:table-cell table:style-name="ce201"/>
          <table:table-cell table:style-name="ce121"/>
          <table:table-cell table:style-name="ce202"/>
          <table:table-cell table:style-name="ce128"/>
          <table:table-cell table:style-name="ce161"/>
          <table:table-cell table:number-columns-repeated="16358"/>
        </table:table-row>
        <table:table-row table:style-name="ro1">
          <table:table-cell table:number-columns-repeated="2"/>
          <table:covered-table-cell table:style-name="ce85"/>
          <table:table-cell table:style-name="ce117" office:value-type="float" office:value="8.55" calcext:value-type="float">
            <text:p>8.55</text:p>
          </table:table-cell>
          <table:table-cell table:style-name="ce137" table:formula="of:=MULTIPLE.OPERATIONS([.E$75];[.$D$20];[.$D77])" office:value-type="float" office:value="3104.19122762355" calcext:value-type="float">
            <text:p>3104</text:p>
          </table:table-cell>
          <table:table-cell table:style-name="ce152" table:formula="of:=MULTIPLE.OPERATIONS([.F$75];[.$D$20];[.$D77])" office:value-type="percentage" office:value="0.108592220950731" calcext:value-type="percentage">
            <text:p>10.86 %</text:p>
          </table:table-cell>
          <table:table-cell table:style-name="ce162" office:value-type="float" office:value="6666.66666666667" calcext:value-type="float">
            <text:p><text:s/>6,667 </text:p>
          </table:table-cell>
          <table:table-cell table:number-columns-repeated="3"/>
          <table:table-cell table:style-name="ce119"/>
          <table:table-cell table:style-name="ce126"/>
          <table:table-cell table:style-name="ce197"/>
          <table:table-cell table:style-name="ce76"/>
          <table:table-cell table:number-columns-repeated="2"/>
          <table:table-cell table:style-name="ce119"/>
          <table:table-cell table:style-name="ce126"/>
          <table:table-cell table:style-name="ce197"/>
          <table:table-cell table:style-name="ce199"/>
          <table:table-cell table:number-columns-repeated="2"/>
          <table:table-cell table:style-name="ce122"/>
          <table:table-cell table:style-name="ce203"/>
          <table:table-cell table:style-name="ce197"/>
          <table:table-cell table:style-name="ce53"/>
          <table:table-cell table:number-columns-repeated="16358"/>
        </table:table-row>
        <table:table-row table:style-name="ro1">
          <table:table-cell table:number-columns-repeated="2"/>
          <table:covered-table-cell table:style-name="ce85"/>
          <table:table-cell table:style-name="ce87" office:value-type="float" office:value="8.65" calcext:value-type="float">
            <text:p>8.65</text:p>
          </table:table-cell>
          <table:table-cell table:style-name="ce126" table:formula="of:=MULTIPLE.OPERATIONS([.E$75];[.$D$20];[.$D78])" office:value-type="float" office:value="6194.30727334818" calcext:value-type="float">
            <text:p>6194</text:p>
          </table:table-cell>
          <table:table-cell table:style-name="ce152" table:formula="of:=MULTIPLE.OPERATIONS([.F$75];[.$D$20];[.$D78])" office:value-type="percentage" office:value="0.117081418811846" calcext:value-type="percentage">
            <text:p>11.71 %</text:p>
          </table:table-cell>
          <table:table-cell table:style-name="ce162" office:value-type="float" office:value="6569.34306569343" calcext:value-type="float">
            <text:p><text:s/>6,569 </text:p>
          </table:table-cell>
          <table:table-cell table:number-columns-repeated="3"/>
          <table:table-cell table:style-name="ce117"/>
          <table:table-cell table:style-name="ce137"/>
          <table:table-cell table:style-name="ce197"/>
          <table:table-cell table:style-name="ce162"/>
          <table:table-cell table:number-columns-repeated="2"/>
          <table:table-cell table:style-name="ce126"/>
          <table:table-cell table:style-name="ce137"/>
          <table:table-cell table:style-name="ce197"/>
          <table:table-cell table:style-name="ce200"/>
          <table:table-cell table:number-columns-repeated="2"/>
          <table:table-cell table:style-name="ce122"/>
          <table:table-cell table:style-name="ce204"/>
          <table:table-cell table:style-name="ce197"/>
          <table:table-cell table:style-name="ce162"/>
          <table:table-cell table:number-columns-repeated="16358"/>
        </table:table-row>
        <table:table-row table:style-name="ro1">
          <table:table-cell table:number-columns-repeated="2"/>
          <table:covered-table-cell table:style-name="ce85"/>
          <table:table-cell table:style-name="ce118" office:value-type="float" office:value="9" calcext:value-type="float">
            <text:p>9.00</text:p>
          </table:table-cell>
          <table:table-cell table:style-name="ce126" table:formula="of:=MULTIPLE.OPERATIONS([.E$75];[.$D$20];[.$D79])" office:value-type="float" office:value="17009.7134333844" calcext:value-type="float">
            <text:p>17010</text:p>
          </table:table-cell>
          <table:table-cell table:style-name="ce152" table:formula="of:=MULTIPLE.OPERATIONS([.F$75];[.$D$20];[.$D79])" office:value-type="percentage" office:value="0.146321425066921" calcext:value-type="percentage">
            <text:p>14.63 %</text:p>
          </table:table-cell>
          <table:table-cell table:style-name="ce162" office:value-type="float" office:value="6250" calcext:value-type="float">
            <text:p><text:s/>6,250 </text:p>
          </table:table-cell>
          <table:table-cell table:number-columns-repeated="3"/>
          <table:table-cell table:style-name="ce87" office:value-type="float" office:value="1.2" calcext:value-type="float">
            <text:p>1.2</text:p>
          </table:table-cell>
          <table:table-cell table:style-name="ce126"/>
          <table:table-cell table:style-name="ce197"/>
          <table:table-cell table:style-name="ce162"/>
          <table:table-cell table:number-columns-repeated="2"/>
          <table:table-cell table:style-name="ce87" office:value-type="float" office:value="45000" calcext:value-type="float">
            <text:p>45000</text:p>
          </table:table-cell>
          <table:table-cell table:style-name="ce126"/>
          <table:table-cell table:style-name="ce197"/>
          <table:table-cell table:style-name="ce200"/>
          <table:table-cell table:number-columns-repeated="2"/>
          <table:table-cell table:style-name="ce123" office:value-type="percentage" office:value="0.08" calcext:value-type="percentage">
            <text:p>8 %</text:p>
          </table:table-cell>
          <table:table-cell table:style-name="ce203"/>
          <table:table-cell table:style-name="ce197"/>
          <table:table-cell table:style-name="ce162"/>
          <table:table-cell table:number-columns-repeated="16358"/>
        </table:table-row>
        <table:table-row table:style-name="ro1">
          <table:table-cell table:number-columns-repeated="2"/>
          <table:covered-table-cell table:style-name="ce85"/>
          <table:table-cell table:style-name="ce117" office:value-type="float" office:value="9.15" calcext:value-type="float">
            <text:p>9.15</text:p>
          </table:table-cell>
          <table:table-cell table:style-name="ce126" table:formula="of:=MULTIPLE.OPERATIONS([.E$75];[.$D$20];[.$D80])" office:value-type="float" office:value="21644.8875019714" calcext:value-type="float">
            <text:p>21645</text:p>
          </table:table-cell>
          <table:table-cell table:style-name="ce152" table:formula="of:=MULTIPLE.OPERATIONS([.F$75];[.$D$20];[.$D80])" office:value-type="percentage" office:value="0.158642856317719" calcext:value-type="percentage">
            <text:p>15.86 %</text:p>
          </table:table-cell>
          <table:table-cell table:style-name="ce162" office:value-type="float" office:value="6122.44897959184" calcext:value-type="float">
            <text:p><text:s/>6,122 </text:p>
          </table:table-cell>
          <table:table-cell table:number-columns-repeated="3"/>
          <table:table-cell table:style-name="ce117"/>
          <table:table-cell table:style-name="ce126"/>
          <table:table-cell table:style-name="ce197"/>
          <table:table-cell table:style-name="ce162"/>
          <table:table-cell table:number-columns-repeated="2"/>
          <table:table-cell table:style-name="ce126" table:number-columns-repeated="2"/>
          <table:table-cell table:style-name="ce197"/>
          <table:table-cell table:style-name="ce200"/>
          <table:table-cell table:number-columns-repeated="2"/>
          <table:table-cell table:style-name="ce122"/>
          <table:table-cell table:style-name="ce203"/>
          <table:table-cell table:style-name="ce197"/>
          <table:table-cell table:style-name="ce162"/>
          <table:table-cell table:number-columns-repeated="16358"/>
        </table:table-row>
        <table:table-row table:style-name="ro1">
          <table:table-cell table:number-columns-repeated="2"/>
          <table:covered-table-cell table:style-name="ce85"/>
          <table:table-cell table:style-name="ce117" office:value-type="float" office:value="9.3" calcext:value-type="float">
            <text:p>9.30</text:p>
          </table:table-cell>
          <table:table-cell table:style-name="ce126" table:formula="of:=MULTIPLE.OPERATIONS([.E$75];[.$D$20];[.$D81])" office:value-type="float" office:value="26280.0615705584" calcext:value-type="float">
            <text:p>26280</text:p>
          </table:table-cell>
          <table:table-cell table:style-name="ce152" table:formula="of:=MULTIPLE.OPERATIONS([.F$75];[.$D$20];[.$D81])" office:value-type="percentage" office:value="0.170847111697929" calcext:value-type="percentage">
            <text:p>17.08 %</text:p>
          </table:table-cell>
          <table:table-cell table:style-name="ce162" office:value-type="float" office:value="6000" calcext:value-type="float">
            <text:p><text:s/>6,000 </text:p>
          </table:table-cell>
          <table:table-cell table:number-columns-repeated="3"/>
          <table:table-cell table:style-name="ce117"/>
          <table:table-cell table:style-name="ce126"/>
          <table:table-cell table:style-name="ce197"/>
          <table:table-cell table:style-name="ce162"/>
          <table:table-cell table:number-columns-repeated="2"/>
          <table:table-cell table:style-name="ce126" table:number-columns-repeated="2"/>
          <table:table-cell table:style-name="ce197"/>
          <table:table-cell table:style-name="ce200"/>
          <table:table-cell table:number-columns-repeated="2"/>
          <table:table-cell table:style-name="ce122"/>
          <table:table-cell table:style-name="ce203"/>
          <table:table-cell table:style-name="ce197"/>
          <table:table-cell table:style-name="ce162"/>
          <table:table-cell table:number-columns-repeated="16358"/>
        </table:table-row>
        <table:table-row table:style-name="ro1">
          <table:table-cell table:number-columns-repeated="2"/>
          <table:covered-table-cell table:style-name="ce85"/>
          <table:table-cell table:style-name="ce119" office:value-type="float" office:value="9.45" calcext:value-type="float">
            <text:p>9.45</text:p>
          </table:table-cell>
          <table:table-cell table:style-name="ce126" table:formula="of:=MULTIPLE.OPERATIONS([.E$75];[.$D$20];[.$D82])" office:value-type="float" office:value="30915.2356391453" calcext:value-type="float">
            <text:p>30915</text:p>
          </table:table-cell>
          <table:table-cell table:style-name="ce152" table:formula="of:=MULTIPLE.OPERATIONS([.F$75];[.$D$20];[.$D82])" office:value-type="percentage" office:value="0.182939753658407" calcext:value-type="percentage">
            <text:p>18.29 %</text:p>
          </table:table-cell>
          <table:table-cell table:style-name="ce162" office:value-type="float" office:value="5882.35294117647" calcext:value-type="float">
            <text:p><text:s/>5,882 </text:p>
          </table:table-cell>
          <table:table-cell table:number-columns-repeated="2"/>
          <table:table-cell table:style-name="ce184"/>
          <table:table-cell table:style-name="ce186" office:value-type="float" office:value="1.75" calcext:value-type="float">
            <text:p>1.75</text:p>
          </table:table-cell>
          <table:table-cell table:style-name="ce126"/>
          <table:table-cell table:style-name="ce197"/>
          <table:table-cell table:style-name="ce162"/>
          <table:table-cell/>
          <table:table-cell table:style-name="ce184"/>
          <table:table-cell table:style-name="ce127"/>
          <table:table-cell table:style-name="ce126"/>
          <table:table-cell table:style-name="ce197"/>
          <table:table-cell table:style-name="ce200"/>
          <table:table-cell table:number-columns-repeated="2"/>
          <table:table-cell table:style-name="ce124"/>
          <table:table-cell table:style-name="ce203"/>
          <table:table-cell table:style-name="ce197"/>
          <table:table-cell table:style-name="ce162"/>
          <table:table-cell table:number-columns-repeated="16358"/>
        </table:table-row>
        <table:table-row table:style-name="ro1">
          <table:table-cell/>
          <table:table-cell table:style-name="ce34" office:value-type="string" calcext:value-type="string">
            <text:p>Comentario:</text:p>
          </table:table-cell>
          <table:table-cell table:number-columns-repeated="6"/>
          <table:table-cell table:style-name="ce34" office:value-type="string" calcext:value-type="string">
            <text:p>Comentario</text:p>
          </table:table-cell>
          <table:table-cell table:number-columns-repeated="6"/>
          <table:table-cell table:style-name="ce34" office:value-type="string" calcext:value-type="string">
            <text:p>Comentario</text:p>
          </table:table-cell>
          <table:table-cell table:number-columns-repeated="5"/>
          <table:table-cell table:style-name="ce34" office:value-type="string" calcext:value-type="string">
            <text:p>Comentario</text:p>
          </table:table-cell>
          <table:table-cell table:number-columns-repeated="16362"/>
        </table:table-row>
        <table:table-row table:style-name="ro1">
          <table:table-cell/>
          <table:table-cell table:style-name="ce33" office:value-type="string" calcext:value-type="string">
            <text:p>El valor del VANE es muy sensible ante una variación en el precio, por lo tanto el</text:p>
          </table:table-cell>
          <table:table-cell table:number-columns-repeated="6"/>
          <table:table-cell table:style-name="ce33" office:value-type="string" calcext:value-type="string">
            <text:p>El valor del VANE es muy sensible ante una variación en el precio, por lo tanto el</text:p>
          </table:table-cell>
          <table:table-cell table:number-columns-repeated="6"/>
          <table:table-cell table:style-name="ce33" office:value-type="string" calcext:value-type="string">
            <text:p>El valor del VAN es muy sensible ante una variación en el Costo Fijo,</text:p>
          </table:table-cell>
          <table:table-cell table:number-columns-repeated="5"/>
          <table:table-cell table:style-name="ce33" office:value-type="string" calcext:value-type="string">
            <text:p>El valor del VAN es muy sensible ante una variación en la tasa de</text:p>
          </table:table-cell>
          <table:table-cell table:number-columns-repeated="16362"/>
        </table:table-row>
        <table:table-row table:style-name="ro1">
          <table:table-cell/>
          <table:table-cell table:style-name="ce33" office:value-type="string" calcext:value-type="string">
            <text:p>precio del producto no debe ser menor de <text:s/>S/. 8.45 para que tenga la rentabilidad </text:p>
          </table:table-cell>
          <table:table-cell table:number-columns-repeated="6"/>
          <table:table-cell table:style-name="ce33" office:value-type="string" calcext:value-type="string">
            <text:p>precio de la Materia Prima no debe ser mayor de <text:s text:c="6"/>para que tenga la rentabilidad </text:p>
          </table:table-cell>
          <table:table-cell table:number-columns-repeated="6"/>
          <table:table-cell table:style-name="ce33" office:value-type="string" calcext:value-type="string">
            <text:p>por lo tanto el CF debe ser mayor a <text:s/>S/. <text:s text:c="12"/>para se obtenga la </text:p>
          </table:table-cell>
          <table:table-cell table:number-columns-repeated="5"/>
          <table:table-cell table:style-name="ce33" office:value-type="string" calcext:value-type="string">
            <text:p>crecimiento de las ventas no <text:s/>debe ser menor a… % <text:s text:c="12"/>para <text:s/></text:p>
          </table:table-cell>
          <table:table-cell table:number-columns-repeated="16362"/>
        </table:table-row>
        <table:table-row table:style-name="ro1">
          <table:table-cell/>
          <table:table-cell table:style-name="ce33" office:value-type="string" calcext:value-type="string">
            <text:p>económica esperada.</text:p>
          </table:table-cell>
          <table:table-cell table:number-columns-repeated="6"/>
          <table:table-cell table:style-name="ce33" office:value-type="string" calcext:value-type="string">
            <text:p>económica esperada.</text:p>
          </table:table-cell>
          <table:table-cell table:number-columns-repeated="6"/>
          <table:table-cell table:style-name="ce168" office:value-type="string" calcext:value-type="string">
            <text:p>rentabilidad económica esperada.</text:p>
          </table:table-cell>
          <table:table-cell table:number-columns-repeated="5"/>
          <table:table-cell table:style-name="ce168" office:value-type="string" calcext:value-type="string">
            <text:p>que se obtenga la rentabilidad económica esperada.</text:p>
          </table:table-cell>
          <table:table-cell table:number-columns-repeated="16362"/>
        </table:table-row>
        <table:table-row table:style-name="ro1">
          <table:table-cell/>
          <table:table-cell table:style-name="ce33"/>
          <table:table-cell table:number-columns-repeated="6"/>
          <table:table-cell table:style-name="ce33"/>
          <table:table-cell table:number-columns-repeated="6"/>
          <table:table-cell table:style-name="ce168"/>
          <table:table-cell table:number-columns-repeated="5"/>
          <table:table-cell table:style-name="ce168"/>
          <table:table-cell table:number-columns-repeated="16362"/>
        </table:table-row>
        <table:table-row table:style-name="ro1">
          <table:table-cell/>
          <table:table-cell table:style-name="ce58" office:value-type="string" calcext:value-type="string">
            <text:p>2.- ANALISIS DE SENSIBILIDAD BIDIMENSIONAL</text:p>
          </table:table-cell>
          <table:table-cell table:style-name="ce86" table:number-columns-repeated="2"/>
          <table:table-cell table:number-columns-repeated="16380"/>
        </table:table-row>
        <table:table-row table:style-name="ro1">
          <table:table-cell/>
          <table:table-cell table:style-name="ce33"/>
          <table:table-cell table:number-columns-repeated="16382"/>
        </table:table-row>
        <table:table-row table:style-name="ro1">
          <table:table-cell/>
          <table:table-cell table:style-name="ce34" office:value-type="string" calcext:value-type="string">
            <text:p>A. TASA DE CRECIMIENTO VS PRECIO</text:p>
          </table:table-cell>
          <table:table-cell table:number-columns-repeated="2"/>
          <table:table-cell table:style-name="ce59" office:value-type="string" calcext:value-type="string">
            <text:p>¿Cómo varia el VANE al modificarse la tasa de crecimiento y el precio del producto?</text:p>
          </table:table-cell>
          <table:table-cell table:style-name="ce59" table:number-columns-repeated="5"/>
          <table:table-cell table:number-columns-repeated="16374"/>
        </table:table-row>
        <table:table-row table:style-name="ro1">
          <table:table-cell/>
          <table:table-cell table:style-name="ce33"/>
          <table:table-cell table:number-columns-repeated="16382"/>
        </table:table-row>
        <table:table-row table:style-name="ro1">
          <table:table-cell/>
          <table:table-cell table:style-name="ce33"/>
          <table:table-cell/>
          <table:table-cell table:style-name="ce120" table:formula="of:=VAN" office:value-type="float" office:value="17009.7134333844" calcext:value-type="float">
            <text:p>17010</text:p>
          </table:table-cell>
          <table:table-cell table:style-name="ce116" office:value-type="float" office:value="8.45" calcext:value-type="float">
            <text:p>8.45</text:p>
          </table:table-cell>
          <table:table-cell table:style-name="ce153" office:value-type="float" office:value="8.65" calcext:value-type="float">
            <text:p><text:s/>8.65 </text:p>
          </table:table-cell>
          <table:table-cell table:style-name="ce115" office:value-type="float" office:value="8.85" calcext:value-type="float">
            <text:p>8.85</text:p>
          </table:table-cell>
          <table:table-cell table:style-name="ce87" office:value-type="float" office:value="9" calcext:value-type="float">
            <text:p>9</text:p>
          </table:table-cell>
          <table:table-cell table:style-name="ce82" office:value-type="float" office:value="9.15" calcext:value-type="float">
            <text:p>9.15</text:p>
          </table:table-cell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45" calcext:value-type="float">
            <text:p>9.45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1" office:value-type="percentage" office:value="0.0362" calcext:value-type="percentage">
            <text:p>3.62 %</text:p>
          </table:table-cell>
          <table:table-cell table:style-name="ce138" table:formula="of:=MULTIPLE.OPERATIONS([.$D$92];[.$D$21];[.$D93];[.$D$20];[.E$92])" office:value-type="float" office:value="-15703.5771734049" calcext:value-type="float">
            <text:p>-15704</text:p>
          </table:table-cell>
          <table:table-cell table:style-name="ce154" table:formula="of:=MULTIPLE.OPERATIONS([.$D$92];[.$D$21];[.$D93];[.$D$20];[.F$92])" office:value-type="float" office:value="-9996.05643098729" calcext:value-type="float">
            <text:p>-9996</text:p>
          </table:table-cell>
          <table:table-cell table:style-name="ce163" table:formula="of:=MULTIPLE.OPERATIONS([.$D$92];[.$D$21];[.$D93];[.$D$20];[.G$92])" office:value-type="float" office:value="-4288.53568856971" calcext:value-type="float">
            <text:p>-4289</text:p>
          </table:table-cell>
          <table:table-cell table:style-name="ce139" table:formula="of:=MULTIPLE.OPERATIONS([.$D$92];[.$D$21];[.$D93];[.$D$20];[.H$92])" office:value-type="float" office:value="-7.89513175649336" calcext:value-type="float">
            <text:p>-8</text:p>
          </table:table-cell>
          <table:table-cell table:style-name="ce175" table:formula="of:=MULTIPLE.OPERATIONS([.$D$92];[.$D$21];[.$D93];[.$D$20];[.I$92])" office:value-type="float" office:value="4272.7454250567" calcext:value-type="float">
            <text:p>4273</text:p>
          </table:table-cell>
          <table:table-cell table:style-name="ce175" table:formula="of:=MULTIPLE.OPERATIONS([.$D$92];[.$D$21];[.$D93];[.$D$20];[.J$92])" office:value-type="float" office:value="8553.38598186991" calcext:value-type="float">
            <text:p>8553</text:p>
          </table:table-cell>
          <table:table-cell table:style-name="ce175" table:formula="of:=MULTIPLE.OPERATIONS([.$D$92];[.$D$21];[.$D93];[.$D$20];[.K$92])" office:value-type="float" office:value="12834.0265386831" calcext:value-type="float">
            <text:p>12834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2" office:value-type="percentage" office:value="0.045" calcext:value-type="percentage">
            <text:p>5 %</text:p>
          </table:table-cell>
          <table:table-cell table:style-name="ce139" table:formula="of:=MULTIPLE.OPERATIONS([.$D$92];[.$D$21];[.$D94];[.$D$20];[.E$92])" office:value-type="float" office:value="-12647.4564468583" calcext:value-type="float">
            <text:p>-12647</text:p>
          </table:table-cell>
          <table:table-cell table:style-name="ce139" table:formula="of:=MULTIPLE.OPERATIONS([.$D$92];[.$D$21];[.$D94];[.$D$20];[.F$92])" office:value-type="float" office:value="-6848.022299131" calcext:value-type="float">
            <text:p>-6848</text:p>
          </table:table-cell>
          <table:table-cell table:style-name="ce139" table:formula="of:=MULTIPLE.OPERATIONS([.$D$92];[.$D$21];[.$D94];[.$D$20];[.G$92])" office:value-type="float" office:value="-1048.58815140375" calcext:value-type="float">
            <text:p>-1049</text:p>
          </table:table-cell>
          <table:table-cell table:style-name="ce175" table:formula="of:=MULTIPLE.OPERATIONS([.$D$92];[.$D$21];[.$D94];[.$D$20];[.H$92])" office:value-type="float" office:value="3300.9874593917" calcext:value-type="float">
            <text:p>3301</text:p>
          </table:table-cell>
          <table:table-cell table:style-name="ce175" table:formula="of:=MULTIPLE.OPERATIONS([.$D$92];[.$D$21];[.$D94];[.$D$20];[.I$92])" office:value-type="float" office:value="7650.56307018717" calcext:value-type="float">
            <text:p>7651</text:p>
          </table:table-cell>
          <table:table-cell table:style-name="ce175" table:formula="of:=MULTIPLE.OPERATIONS([.$D$92];[.$D$21];[.$D94];[.$D$20];[.J$92])" office:value-type="float" office:value="12000.1386809826" calcext:value-type="float">
            <text:p>12000</text:p>
          </table:table-cell>
          <table:table-cell table:style-name="ce175" table:formula="of:=MULTIPLE.OPERATIONS([.$D$92];[.$D$21];[.$D94];[.$D$20];[.K$92])" office:value-type="float" office:value="16349.714291778" calcext:value-type="float">
            <text:p>16350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2" office:value-type="percentage" office:value="0.065" calcext:value-type="percentage">
            <text:p>7 %</text:p>
          </table:table-cell>
          <table:table-cell table:style-name="ce140" table:formula="of:=MULTIPLE.OPERATIONS([.$D$92];[.$D$21];[.$D95];[.$D$20];[.E$92])" office:value-type="float" office:value="-5512.75567691587" calcext:value-type="float">
            <text:p>-5513</text:p>
          </table:table-cell>
          <table:table-cell table:style-name="ce141" table:formula="of:=MULTIPLE.OPERATIONS([.$D$92];[.$D$21];[.$D95];[.$D$20];[.F$92])" office:value-type="float" office:value="501.255937576614" calcext:value-type="float">
            <text:p>501</text:p>
          </table:table-cell>
          <table:table-cell table:style-name="ce164" table:formula="of:=MULTIPLE.OPERATIONS([.$D$92];[.$D$21];[.$D95];[.$D$20];[.G$92])" office:value-type="float" office:value="6515.26755206907" calcext:value-type="float">
            <text:p>6515</text:p>
          </table:table-cell>
          <table:table-cell table:style-name="ce175" table:formula="of:=MULTIPLE.OPERATIONS([.$D$92];[.$D$21];[.$D95];[.$D$20];[.H$92])" office:value-type="float" office:value="11025.7762629384" calcext:value-type="float">
            <text:p>11026</text:p>
          </table:table-cell>
          <table:table-cell table:style-name="ce175" table:formula="of:=MULTIPLE.OPERATIONS([.$D$92];[.$D$21];[.$D95];[.$D$20];[.I$92])" office:value-type="float" office:value="15536.2849738078" calcext:value-type="float">
            <text:p>15536</text:p>
          </table:table-cell>
          <table:table-cell table:style-name="ce175" table:formula="of:=MULTIPLE.OPERATIONS([.$D$92];[.$D$21];[.$D95];[.$D$20];[.J$92])" office:value-type="float" office:value="20046.7936846771" calcext:value-type="float">
            <text:p>20047</text:p>
          </table:table-cell>
          <table:table-cell table:style-name="ce175" table:formula="of:=MULTIPLE.OPERATIONS([.$D$92];[.$D$21];[.$D95];[.$D$20];[.K$92])" office:value-type="float" office:value="24557.3023955464" calcext:value-type="float">
            <text:p>24557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3" office:value-type="percentage" office:value="0.08" calcext:value-type="percentage">
            <text:p>8 %</text:p>
          </table:table-cell>
          <table:table-cell table:style-name="ce141" table:formula="of:=MULTIPLE.OPERATIONS([.$D$92];[.$D$21];[.$D96];[.$D$20];[.E$92])" office:value-type="float" office:value="14.0751818988792" calcext:value-type="float">
            <text:p>14</text:p>
          </table:table-cell>
          <table:table-cell table:style-name="ce141" table:formula="of:=MULTIPLE.OPERATIONS([.$D$92];[.$D$21];[.$D96];[.$D$20];[.F$92])" office:value-type="float" office:value="6194.30727334818" calcext:value-type="float">
            <text:p>6194</text:p>
          </table:table-cell>
          <table:table-cell table:style-name="ce164" table:formula="of:=MULTIPLE.OPERATIONS([.$D$92];[.$D$21];[.$D96];[.$D$20];[.G$92])" office:value-type="float" office:value="12374.5393647975" calcext:value-type="float">
            <text:p>12375</text:p>
          </table:table-cell>
          <table:table-cell table:style-name="ce175" table:formula="of:=MULTIPLE.OPERATIONS([.$D$92];[.$D$21];[.$D96];[.$D$20];[.H$92])" office:value-type="float" office:value="17009.7134333844" calcext:value-type="float">
            <text:p>17010</text:p>
          </table:table-cell>
          <table:table-cell table:style-name="ce175" table:formula="of:=MULTIPLE.OPERATIONS([.$D$92];[.$D$21];[.$D96];[.$D$20];[.I$92])" office:value-type="float" office:value="21644.8875019714" calcext:value-type="float">
            <text:p>21645</text:p>
          </table:table-cell>
          <table:table-cell table:style-name="ce175" table:formula="of:=MULTIPLE.OPERATIONS([.$D$92];[.$D$21];[.$D96];[.$D$20];[.J$92])" office:value-type="float" office:value="26280.0615705584" calcext:value-type="float">
            <text:p>26280</text:p>
          </table:table-cell>
          <table:table-cell table:style-name="ce175" table:formula="of:=MULTIPLE.OPERATIONS([.$D$92];[.$D$21];[.$D96];[.$D$20];[.K$92])" office:value-type="float" office:value="30915.2356391453" calcext:value-type="float">
            <text:p>30915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2" office:value-type="percentage" office:value="0.09" calcext:value-type="percentage">
            <text:p>9 %</text:p>
          </table:table-cell>
          <table:table-cell table:style-name="ce141" table:formula="of:=MULTIPLE.OPERATIONS([.$D$92];[.$D$21];[.$D97];[.$D$20];[.E$92])" office:value-type="float" office:value="3784.10779198819" calcext:value-type="float">
            <text:p>3784</text:p>
          </table:table-cell>
          <table:table-cell table:style-name="ce141" table:formula="of:=MULTIPLE.OPERATIONS([.$D$92];[.$D$21];[.$D97];[.$D$20];[.F$92])" office:value-type="float" office:value="10077.7243228387" calcext:value-type="float">
            <text:p>10078</text:p>
          </table:table-cell>
          <table:table-cell table:style-name="ce164" table:formula="of:=MULTIPLE.OPERATIONS([.$D$92];[.$D$21];[.$D97];[.$D$20];[.G$92])" office:value-type="float" office:value="16371.3408536892" calcext:value-type="float">
            <text:p>16371</text:p>
          </table:table-cell>
          <table:table-cell table:style-name="ce175" table:formula="of:=MULTIPLE.OPERATIONS([.$D$92];[.$D$21];[.$D97];[.$D$20];[.H$92])" office:value-type="float" office:value="21091.5532518271" calcext:value-type="float">
            <text:p>21092</text:p>
          </table:table-cell>
          <table:table-cell table:style-name="ce175" table:formula="of:=MULTIPLE.OPERATIONS([.$D$92];[.$D$21];[.$D97];[.$D$20];[.I$92])" office:value-type="float" office:value="25811.7656499649" calcext:value-type="float">
            <text:p>25812</text:p>
          </table:table-cell>
          <table:table-cell table:style-name="ce175" table:formula="of:=MULTIPLE.OPERATIONS([.$D$92];[.$D$21];[.$D97];[.$D$20];[.J$92])" office:value-type="float" office:value="30531.9780481028" calcext:value-type="float">
            <text:p>30532</text:p>
          </table:table-cell>
          <table:table-cell table:style-name="ce175" table:formula="of:=MULTIPLE.OPERATIONS([.$D$92];[.$D$21];[.$D97];[.$D$20];[.K$92])" office:value-type="float" office:value="35252.1904462406" calcext:value-type="float">
            <text:p>35252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2" office:value-type="percentage" office:value="0.1" calcext:value-type="percentage">
            <text:p>10 %</text:p>
          </table:table-cell>
          <table:table-cell table:style-name="ce141" table:formula="of:=MULTIPLE.OPERATIONS([.$D$92];[.$D$21];[.$D98];[.$D$20];[.E$92])" office:value-type="float" office:value="7623.63086848264" calcext:value-type="float">
            <text:p>7624</text:p>
          </table:table-cell>
          <table:table-cell table:style-name="ce141" table:formula="of:=MULTIPLE.OPERATIONS([.$D$92];[.$D$21];[.$D98];[.$D$20];[.F$92])" office:value-type="float" office:value="14032.7217775736" calcext:value-type="float">
            <text:p>14033</text:p>
          </table:table-cell>
          <table:table-cell table:style-name="ce164" table:formula="of:=MULTIPLE.OPERATIONS([.$D$92];[.$D$21];[.$D98];[.$D$20];[.G$92])" office:value-type="float" office:value="20441.8126866645" calcext:value-type="float">
            <text:p>20442</text:p>
          </table:table-cell>
          <table:table-cell table:style-name="ce175" table:formula="of:=MULTIPLE.OPERATIONS([.$D$92];[.$D$21];[.$D98];[.$D$20];[.H$92])" office:value-type="float" office:value="25248.6308684827" calcext:value-type="float">
            <text:p>25249</text:p>
          </table:table-cell>
          <table:table-cell table:style-name="ce175" table:formula="of:=MULTIPLE.OPERATIONS([.$D$92];[.$D$21];[.$D98];[.$D$20];[.I$92])" office:value-type="float" office:value="30055.4490503008" calcext:value-type="float">
            <text:p>30055</text:p>
          </table:table-cell>
          <table:table-cell table:style-name="ce175" table:formula="of:=MULTIPLE.OPERATIONS([.$D$92];[.$D$21];[.$D98];[.$D$20];[.J$92])" office:value-type="float" office:value="34862.2672321191" calcext:value-type="float">
            <text:p>34862</text:p>
          </table:table-cell>
          <table:table-cell table:style-name="ce175" table:formula="of:=MULTIPLE.OPERATIONS([.$D$92];[.$D$21];[.$D98];[.$D$20];[.K$92])" office:value-type="float" office:value="39669.0854139372" calcext:value-type="float">
            <text:p>39669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4" office:value-type="percentage" office:value="0.11" calcext:value-type="percentage">
            <text:p>11 %</text:p>
          </table:table-cell>
          <table:table-cell table:style-name="ce141" table:formula="of:=MULTIPLE.OPERATIONS([.$D$92];[.$D$21];[.$D99];[.$D$20];[.E$92])" office:value-type="float" office:value="11533.6015594905" calcext:value-type="float">
            <text:p>11534</text:p>
          </table:table-cell>
          <table:table-cell table:style-name="ce155" table:formula="of:=MULTIPLE.OPERATIONS([.$D$92];[.$D$21];[.$D99];[.$D$20];[.F$92])" office:value-type="float" office:value="18060.2855720704" calcext:value-type="float">
            <text:p>18060</text:p>
          </table:table-cell>
          <table:table-cell table:style-name="ce164" table:formula="of:=MULTIPLE.OPERATIONS([.$D$92];[.$D$21];[.$D99];[.$D$20];[.G$92])" office:value-type="float" office:value="24586.9695846502" calcext:value-type="float">
            <text:p>24587</text:p>
          </table:table-cell>
          <table:table-cell table:style-name="ce175" table:formula="of:=MULTIPLE.OPERATIONS([.$D$92];[.$D$21];[.$D99];[.$D$20];[.H$92])" office:value-type="float" office:value="29481.9825940851" calcext:value-type="float">
            <text:p>29482</text:p>
          </table:table-cell>
          <table:table-cell table:style-name="ce175" table:formula="of:=MULTIPLE.OPERATIONS([.$D$92];[.$D$21];[.$D99];[.$D$20];[.I$92])" office:value-type="float" office:value="34376.99560352" calcext:value-type="float">
            <text:p>34377</text:p>
          </table:table-cell>
          <table:table-cell table:style-name="ce175" table:formula="of:=MULTIPLE.OPERATIONS([.$D$92];[.$D$21];[.$D99];[.$D$20];[.J$92])" office:value-type="float" office:value="39272.008612955" calcext:value-type="float">
            <text:p>39272</text:p>
          </table:table-cell>
          <table:table-cell table:style-name="ce175" table:formula="of:=MULTIPLE.OPERATIONS([.$D$92];[.$D$21];[.$D99];[.$D$20];[.K$92])" office:value-type="float" office:value="44167.0216223898" calcext:value-type="float">
            <text:p>44167</text:p>
          </table:table-cell>
          <table:table-cell table:number-columns-repeated="16373"/>
        </table:table-row>
        <table:table-row table:style-name="ro1">
          <table:table-cell/>
          <table:table-cell table:style-name="ce33" office:value-type="string" calcext:value-type="string">
            <text:p>Comentario: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33"/>
          <table:table-cell table:number-columns-repeated="16382"/>
        </table:table-row>
        <table:table-row table:style-name="ro1">
          <table:table-cell/>
          <table:table-cell table:style-name="ce33" office:value-type="string" calcext:value-type="string">
            <text:p><text:span text:style-name="T1">B. COSTO FIJO VS PRECIO M.P</text:span><text:span text:style-name="T2">.</text:span></text:p>
          </table:table-cell>
          <table:table-cell/>
          <table:table-cell table:style-name="ce59" office:value-type="string" calcext:value-type="string">
            <text:p>¿Cómo varia el VANE al modificarse el costo fijo y el precio de la materia prima?</text:p>
          </table:table-cell>
          <table:table-cell table:number-columns-repeated="16380"/>
        </table:table-row>
        <table:table-row table:style-name="ro1">
          <table:table-cell/>
          <table:table-cell table:style-name="ce33"/>
          <table:table-cell table:number-columns-repeated="16382"/>
        </table:table-row>
        <table:table-row table:style-name="ro1">
          <table:table-cell/>
          <table:table-cell table:style-name="ce33"/>
          <table:table-cell/>
          <table:table-cell table:style-name="ce120"/>
          <table:table-cell table:style-name="ce119" office:value-type="float" office:value="0.9" calcext:value-type="float">
            <text:p>0.9</text:p>
          </table:table-cell>
          <table:table-cell table:style-name="ce153" office:value-type="float" office:value="1" calcext:value-type="float">
            <text:p><text:s/>1.00 </text:p>
          </table:table-cell>
          <table:table-cell table:style-name="ce115" office:value-type="float" office:value="1.1" calcext:value-type="float">
            <text:p>1.1</text:p>
          </table:table-cell>
          <table:table-cell table:style-name="ce87" office:value-type="float" office:value="1.2" calcext:value-type="float">
            <text:p>1.2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1.55" calcext:value-type="float">
            <text:p>1.55</text:p>
          </table:table-cell>
          <table:table-cell table:style-name="ce187" office:value-type="float" office:value="1.75" calcext:value-type="float">
            <text:p>1.75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5" office:value-type="float" office:value="42000" calcext:value-type="float">
            <text:p>42000.0</text:p>
          </table:table-cell>
          <table:table-cell table:style-name="ce142"/>
          <table:table-cell table:style-name="ce156"/>
          <table:table-cell table:style-name="ce165"/>
          <table:table-cell table:style-name="ce143" table:number-columns-repeated="4"/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19" office:value-type="float" office:value="43000" calcext:value-type="float">
            <text:p>43000</text:p>
          </table:table-cell>
          <table:table-cell table:style-name="ce143" table:number-columns-repeated="7"/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6" office:value-type="float" office:value="44000" calcext:value-type="float">
            <text:p>44000</text:p>
          </table:table-cell>
          <table:table-cell table:style-name="ce142"/>
          <table:table-cell table:style-name="ce143"/>
          <table:table-cell table:style-name="ce157"/>
          <table:table-cell table:style-name="ce143" table:number-columns-repeated="4"/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87" office:value-type="float" office:value="45000" calcext:value-type="float">
            <text:p>45000</text:p>
          </table:table-cell>
          <table:table-cell table:style-name="ce143" table:number-columns-repeated="2"/>
          <table:table-cell table:style-name="ce157"/>
          <table:table-cell table:style-name="ce143" table:number-columns-repeated="4"/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6" office:value-type="float" office:value="47000" calcext:value-type="float">
            <text:p>47000</text:p>
          </table:table-cell>
          <table:table-cell table:style-name="ce143" table:number-columns-repeated="2"/>
          <table:table-cell table:style-name="ce157"/>
          <table:table-cell table:style-name="ce143" table:number-columns-repeated="3"/>
          <table:table-cell table:style-name="ce176"/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6" office:value-type="float" office:value="49000" calcext:value-type="float">
            <text:p>49000</text:p>
          </table:table-cell>
          <table:table-cell table:style-name="ce143" table:number-columns-repeated="2"/>
          <table:table-cell table:style-name="ce157"/>
          <table:table-cell table:style-name="ce143" table:number-columns-repeated="2"/>
          <table:table-cell table:style-name="ce176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127" office:value-type="float" office:value="51365" calcext:value-type="float">
            <text:p>51365</text:p>
          </table:table-cell>
          <table:table-cell table:style-name="ce143"/>
          <table:table-cell table:style-name="ce157" table:number-columns-repeated="2"/>
          <table:table-cell table:style-name="ce176" table:number-columns-repeated="4"/>
          <table:table-cell table:number-columns-repeated="16373"/>
        </table:table-row>
        <table:table-row table:style-name="ro1">
          <table:table-cell/>
          <table:table-cell table:style-name="ce33" office:value-type="string" calcext:value-type="string">
            <text:p>Comentario: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33"/>
          <table:table-cell table:number-columns-repeated="16382"/>
        </table:table-row>
        <table:table-row table:style-name="ro1">
          <table:table-cell/>
          <table:table-cell table:style-name="ce34" office:value-type="string" calcext:value-type="string">
            <text:p>C. <text:s/>COSTO FIJO VS PRECIO</text:p>
          </table:table-cell>
          <table:table-cell/>
          <table:table-cell table:style-name="ce59" office:value-type="string" calcext:value-type="string">
            <text:p>¿Cómo varia la TIRE al modificarse el costo fijo y el precio del producto?</text:p>
          </table:table-cell>
          <table:table-cell table:number-columns-repeated="16380"/>
        </table:table-row>
        <table:table-row table:style-name="ro1">
          <table:table-cell/>
          <table:table-cell table:style-name="ce33"/>
          <table:table-cell table:number-columns-repeated="16382"/>
        </table:table-row>
        <table:table-row table:style-name="ro1">
          <table:table-cell/>
          <table:table-cell table:style-name="ce33"/>
          <table:table-cell/>
          <table:table-cell table:style-name="ce128" table:formula="of:=TIR" office:value-type="percentage" office:value="0.146321425066921" calcext:value-type="percentage">
            <text:p>14.63 %</text:p>
          </table:table-cell>
          <table:table-cell table:style-name="ce144" office:value-type="float" office:value="8.45" calcext:value-type="float">
            <text:p>8.45</text:p>
          </table:table-cell>
          <table:table-cell table:style-name="ce158" office:value-type="float" office:value="8.65" calcext:value-type="float">
            <text:p><text:s/>8.65 </text:p>
          </table:table-cell>
          <table:table-cell table:style-name="ce54" office:value-type="float" office:value="8.85" calcext:value-type="float">
            <text:p>8.8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9.15" calcext:value-type="float">
            <text:p>9.15</text:p>
          </table:table-cell>
          <table:table-cell table:style-name="ce53" office:value-type="float" office:value="9.3" calcext:value-type="float">
            <text:p>9.3</text:p>
          </table:table-cell>
          <table:table-cell table:style-name="ce53" office:value-type="float" office:value="9.45" calcext:value-type="float">
            <text:p>9.45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29" office:value-type="float" office:value="42000" calcext:value-type="float">
            <text:p>42000</text:p>
          </table:table-cell>
          <table:table-cell table:style-name="ce145" table:formula="of:=MULTIPLE.OPERATIONS([.$D$118];[.$D$25];[.$D119];[.$D$20];[.E$118])" office:value-type="percentage" office:value="0.122166204272443" calcext:value-type="percentage">
            <text:p>12.22 %</text:p>
          </table:table-cell>
          <table:table-cell table:style-name="ce145" table:formula="of:=MULTIPLE.OPERATIONS([.$D$118];[.$D$25];[.$D119];[.$D$20];[.F$118])" office:value-type="percentage" office:value="0.138939511627828" calcext:value-type="percentage">
            <text:p>13.89 %</text:p>
          </table:table-cell>
          <table:table-cell table:style-name="ce145" table:formula="of:=MULTIPLE.OPERATIONS([.$D$118];[.$D$25];[.$D119];[.$D$20];[.G$118])" office:value-type="percentage" office:value="0.155484450810145" calcext:value-type="percentage">
            <text:p>15.55 %</text:p>
          </table:table-cell>
          <table:table-cell table:style-name="ce146" table:formula="of:=MULTIPLE.OPERATIONS([.$D$118];[.$D$25];[.$D119];[.$D$20];[.H$118])" office:value-type="percentage" office:value="0.16775225647473" calcext:value-type="percentage">
            <text:p>16.78 %</text:p>
          </table:table-cell>
          <table:table-cell table:style-name="ce146" table:formula="of:=MULTIPLE.OPERATIONS([.$D$118];[.$D$25];[.$D119];[.$D$20];[.I$118])" office:value-type="percentage" office:value="0.17990572653506" calcext:value-type="percentage">
            <text:p>17.99 %</text:p>
          </table:table-cell>
          <table:table-cell table:style-name="ce146" table:formula="of:=MULTIPLE.OPERATIONS([.$D$118];[.$D$25];[.$D119];[.$D$20];[.J$118])" office:value-type="percentage" office:value="0.191950236066052" calcext:value-type="percentage">
            <text:p>19.20 %</text:p>
          </table:table-cell>
          <table:table-cell table:style-name="ce146" table:formula="of:=MULTIPLE.OPERATIONS([.$D$118];[.$D$25];[.$D119];[.$D$20];[.K$118])" office:value-type="percentage" office:value="0.203890811278465" calcext:value-type="percentage">
            <text:p>20.39 %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54" office:value-type="float" office:value="43000" calcext:value-type="float">
            <text:p>43000</text:p>
          </table:table-cell>
          <table:table-cell table:style-name="ce146" table:formula="of:=MULTIPLE.OPERATIONS([.$D$118];[.$D$25];[.$D120];[.$D$20];[.E$118])" office:value-type="percentage" office:value="0.114823116349699" calcext:value-type="percentage">
            <text:p>11.48 %</text:p>
          </table:table-cell>
          <table:table-cell table:style-name="ce146" table:formula="of:=MULTIPLE.OPERATIONS([.$D$118];[.$D$25];[.$D120];[.$D$20];[.F$118])" office:value-type="percentage" office:value="0.131683699448441" calcext:value-type="percentage">
            <text:p>13.17 %</text:p>
          </table:table-cell>
          <table:table-cell table:style-name="ce166" table:formula="of:=MULTIPLE.OPERATIONS([.$D$118];[.$D$25];[.$D120];[.$D$20];[.G$118])" office:value-type="percentage" office:value="0.148309969993753" calcext:value-type="percentage">
            <text:p>14.83 %</text:p>
          </table:table-cell>
          <table:table-cell table:style-name="ce146" table:formula="of:=MULTIPLE.OPERATIONS([.$D$118];[.$D$25];[.$D120];[.$D$20];[.H$118])" office:value-type="percentage" office:value="0.160635201519206" calcext:value-type="percentage">
            <text:p>16.06 %</text:p>
          </table:table-cell>
          <table:table-cell table:style-name="ce146" table:formula="of:=MULTIPLE.OPERATIONS([.$D$118];[.$D$25];[.$D120];[.$D$20];[.I$118])" office:value-type="percentage" office:value="0.172843264413498" calcext:value-type="percentage">
            <text:p>17.28 %</text:p>
          </table:table-cell>
          <table:table-cell table:style-name="ce146" table:formula="of:=MULTIPLE.OPERATIONS([.$D$118];[.$D$25];[.$D120];[.$D$20];[.J$118])" office:value-type="percentage" office:value="0.184939720602334" calcext:value-type="percentage">
            <text:p>18.49 %</text:p>
          </table:table-cell>
          <table:table-cell table:style-name="ce146" table:formula="of:=MULTIPLE.OPERATIONS([.$D$118];[.$D$25];[.$D120];[.$D$20];[.K$118])" office:value-type="percentage" office:value="0.196929767214163" calcext:value-type="percentage">
            <text:p>19.69 %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30" office:value-type="float" office:value="44000" calcext:value-type="float">
            <text:p>44000</text:p>
          </table:table-cell>
          <table:table-cell table:style-name="ce146" table:formula="of:=MULTIPLE.OPERATIONS([.$D$118];[.$D$25];[.$D121];[.$D$20];[.E$118])" office:value-type="percentage" office:value="0.107447727648368" calcext:value-type="percentage">
            <text:p>10.74 %</text:p>
          </table:table-cell>
          <table:table-cell table:style-name="ce146" table:formula="of:=MULTIPLE.OPERATIONS([.$D$118];[.$D$25];[.$D121];[.$D$20];[.F$118])" office:value-type="percentage" office:value="0.124397948706188" calcext:value-type="percentage">
            <text:p>12.44 %</text:p>
          </table:table-cell>
          <table:table-cell table:style-name="ce146" table:formula="of:=MULTIPLE.OPERATIONS([.$D$118];[.$D$25];[.$D121];[.$D$20];[.G$118])" office:value-type="percentage" office:value="0.141107692465864" calcext:value-type="percentage">
            <text:p>14.11 %</text:p>
          </table:table-cell>
          <table:table-cell table:style-name="ce146" table:formula="of:=MULTIPLE.OPERATIONS([.$D$118];[.$D$25];[.$D121];[.$D$20];[.H$118])" office:value-type="percentage" office:value="0.15349182755236" calcext:value-type="percentage">
            <text:p>15.35 %</text:p>
          </table:table-cell>
          <table:table-cell table:style-name="ce146" table:formula="of:=MULTIPLE.OPERATIONS([.$D$118];[.$D$25];[.$D121];[.$D$20];[.I$118])" office:value-type="percentage" office:value="0.16575586148995" calcext:value-type="percentage">
            <text:p>16.58 %</text:p>
          </table:table-cell>
          <table:table-cell table:style-name="ce146" table:formula="of:=MULTIPLE.OPERATIONS([.$D$118];[.$D$25];[.$D121];[.$D$20];[.J$118])" office:value-type="percentage" office:value="0.177905551648671" calcext:value-type="percentage">
            <text:p>17.79 %</text:p>
          </table:table-cell>
          <table:table-cell table:style-name="ce146" table:formula="of:=MULTIPLE.OPERATIONS([.$D$118];[.$D$25];[.$D121];[.$D$20];[.K$118])" office:value-type="percentage" office:value="0.189946273759673" calcext:value-type="percentage">
            <text:p>18.99 %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53" office:value-type="float" office:value="45000" calcext:value-type="float">
            <text:p>45000</text:p>
          </table:table-cell>
          <table:table-cell table:style-name="ce146" table:formula="of:=MULTIPLE.OPERATIONS([.$D$118];[.$D$25];[.$D122];[.$D$20];[.E$118])" office:value-type="percentage" office:value="0.100039108362844" calcext:value-type="percentage">
            <text:p>10.00 %</text:p>
          </table:table-cell>
          <table:table-cell table:style-name="ce146" table:formula="of:=MULTIPLE.OPERATIONS([.$D$118];[.$D$25];[.$D122];[.$D$20];[.F$118])" office:value-type="percentage" office:value="0.117081418811846" calcext:value-type="percentage">
            <text:p>11.71 %</text:p>
          </table:table-cell>
          <table:table-cell table:style-name="ce146" table:formula="of:=MULTIPLE.OPERATIONS([.$D$118];[.$D$25];[.$D122];[.$D$20];[.G$118])" office:value-type="percentage" office:value="0.133876856043263" calcext:value-type="percentage">
            <text:p>13.39 %</text:p>
          </table:table-cell>
          <table:table-cell table:style-name="ce146" table:formula="of:=MULTIPLE.OPERATIONS([.$D$118];[.$D$25];[.$D122];[.$D$20];[.H$118])" office:value-type="percentage" office:value="0.146321425066921" calcext:value-type="percentage">
            <text:p>14.63 %</text:p>
          </table:table-cell>
          <table:table-cell table:style-name="ce146" table:formula="of:=MULTIPLE.OPERATIONS([.$D$118];[.$D$25];[.$D122];[.$D$20];[.I$118])" office:value-type="percentage" office:value="0.158642856317719" calcext:value-type="percentage">
            <text:p>15.86 %</text:p>
          </table:table-cell>
          <table:table-cell table:style-name="ce146" table:formula="of:=MULTIPLE.OPERATIONS([.$D$118];[.$D$25];[.$D122];[.$D$20];[.J$118])" office:value-type="percentage" office:value="0.170847111697929" calcext:value-type="percentage">
            <text:p>17.08 %</text:p>
          </table:table-cell>
          <table:table-cell table:style-name="ce146" table:formula="of:=MULTIPLE.OPERATIONS([.$D$118];[.$D$25];[.$D122];[.$D$20];[.K$118])" office:value-type="percentage" office:value="0.182939753658407" calcext:value-type="percentage">
            <text:p>18.29 %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33"/>
          <table:table-cell table:style-name="ce130" office:value-type="float" office:value="47000" calcext:value-type="float">
            <text:p>47000</text:p>
          </table:table-cell>
          <table:table-cell table:style-name="ce147" table:formula="of:=MULTIPLE.OPERATIONS([.$D$118];[.$D$25];[.$D123];[.$D$20];[.E$118])" office:value-type="percentage" office:value="0.0851182771789046" calcext:value-type="percentage">
            <text:p>8.51 %</text:p>
          </table:table-cell>
          <table:table-cell table:style-name="ce146" table:formula="of:=MULTIPLE.OPERATIONS([.$D$118];[.$D$25];[.$D123];[.$D$20];[.F$118])" office:value-type="percentage" office:value="0.102352500058088" calcext:value-type="percentage">
            <text:p>10.24 %</text:p>
          </table:table-cell>
          <table:table-cell table:style-name="ce146" table:formula="of:=MULTIPLE.OPERATIONS([.$D$118];[.$D$25];[.$D123];[.$D$20];[.G$118])" office:value-type="percentage" office:value="0.119326317749464" calcext:value-type="percentage">
            <text:p>11.93 %</text:p>
          </table:table-cell>
          <table:table-cell table:style-name="ce146" table:formula="of:=MULTIPLE.OPERATIONS([.$D$118];[.$D$25];[.$D123];[.$D$20];[.H$118])" office:value-type="percentage" office:value="0.131896568968015" calcext:value-type="percentage">
            <text:p>13.19 %</text:p>
          </table:table-cell>
          <table:table-cell table:style-name="ce146" table:formula="of:=MULTIPLE.OPERATIONS([.$D$118];[.$D$25];[.$D123];[.$D$20];[.I$118])" office:value-type="percentage" office:value="0.1443372770279" calcext:value-type="percentage">
            <text:p>14.43 %</text:p>
          </table:table-cell>
          <table:table-cell table:style-name="ce146" table:formula="of:=MULTIPLE.OPERATIONS([.$D$118];[.$D$25];[.$D123];[.$D$20];[.J$118])" office:value-type="percentage" office:value="0.156654842309667" calcext:value-type="percentage">
            <text:p>15.67 %</text:p>
          </table:table-cell>
          <table:table-cell table:style-name="ce146" table:formula="of:=MULTIPLE.OPERATIONS([.$D$118];[.$D$25];[.$D123];[.$D$20];[.K$118])" office:value-type="percentage" office:value="0.168855226930859" calcext:value-type="percentage">
            <text:p>16.89 %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33"/>
          <table:table-cell table:style-name="ce130" office:value-type="float" office:value="49000" calcext:value-type="float">
            <text:p>49000</text:p>
          </table:table-cell>
          <table:table-cell table:style-name="ce147" table:formula="of:=MULTIPLE.OPERATIONS([.$D$118];[.$D$25];[.$D124];[.$D$20];[.E$118])" office:value-type="percentage" office:value="0.0700524315077738" calcext:value-type="percentage">
            <text:p>7.01 %</text:p>
          </table:table-cell>
          <table:table-cell table:style-name="ce147" table:formula="of:=MULTIPLE.OPERATIONS([.$D$118];[.$D$25];[.$D124];[.$D$20];[.F$118])" office:value-type="percentage" office:value="0.0874895595898175" calcext:value-type="percentage">
            <text:p>8.75 %</text:p>
          </table:table-cell>
          <table:table-cell table:style-name="ce146" table:formula="of:=MULTIPLE.OPERATIONS([.$D$118];[.$D$25];[.$D124];[.$D$20];[.G$118])" office:value-type="percentage" office:value="0.104651678549496" calcext:value-type="percentage">
            <text:p>10.47 %</text:p>
          </table:table-cell>
          <table:table-cell table:style-name="ce146" table:formula="of:=MULTIPLE.OPERATIONS([.$D$118];[.$D$25];[.$D124];[.$D$20];[.H$118])" office:value-type="percentage" office:value="0.1173544301192" calcext:value-type="percentage">
            <text:p>11.74 %</text:p>
          </table:table-cell>
          <table:table-cell table:style-name="ce146" table:formula="of:=MULTIPLE.OPERATIONS([.$D$118];[.$D$25];[.$D124];[.$D$20];[.I$118])" office:value-type="percentage" office:value="0.129920754273792" calcext:value-type="percentage">
            <text:p>12.99 %</text:p>
          </table:table-cell>
          <table:table-cell table:style-name="ce146" table:formula="of:=MULTIPLE.OPERATIONS([.$D$118];[.$D$25];[.$D124];[.$D$20];[.J$118])" office:value-type="percentage" office:value="0.142357533060427" calcext:value-type="percentage">
            <text:p>14.24 %</text:p>
          </table:table-cell>
          <table:table-cell table:style-name="ce146" table:formula="of:=MULTIPLE.OPERATIONS([.$D$118];[.$D$25];[.$D124];[.$D$20];[.K$118])" office:value-type="percentage" office:value="0.154671166690217" calcext:value-type="percentage">
            <text:p>15.47 %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33"/>
          <table:table-cell table:style-name="ce131" office:value-type="float" office:value="51365" calcext:value-type="float">
            <text:p>51365</text:p>
          </table:table-cell>
          <table:table-cell table:style-name="ce147" table:formula="of:=MULTIPLE.OPERATIONS([.$D$118];[.$D$25];[.$D125];[.$D$20];[.E$118])" office:value-type="percentage" office:value="0.0520377667484214" calcext:value-type="percentage">
            <text:p>5.20 %</text:p>
          </table:table-cell>
          <table:table-cell table:style-name="ce147" table:formula="of:=MULTIPLE.OPERATIONS([.$D$118];[.$D$25];[.$D125];[.$D$20];[.F$118])" office:value-type="percentage" office:value="0.0697302440453272" calcext:value-type="percentage">
            <text:p>6.97 %</text:p>
          </table:table-cell>
          <table:table-cell table:style-name="ce147" table:formula="of:=MULTIPLE.OPERATIONS([.$D$118];[.$D$25];[.$D125];[.$D$20];[.G$118])" office:value-type="percentage" office:value="0.0871289030047057" calcext:value-type="percentage">
            <text:p>8.71 %</text:p>
          </table:table-cell>
          <table:table-cell table:style-name="ce147" table:formula="of:=MULTIPLE.OPERATIONS([.$D$118];[.$D$25];[.$D125];[.$D$20];[.H$118])" office:value-type="percentage" office:value="0.0999978501696402" calcext:value-type="percentage">
            <text:p>10.00 %</text:p>
          </table:table-cell>
          <table:table-cell table:style-name="ce146" table:formula="of:=MULTIPLE.OPERATIONS([.$D$118];[.$D$25];[.$D125];[.$D$20];[.I$118])" office:value-type="percentage" office:value="0.112721545413963" calcext:value-type="percentage">
            <text:p>11.27 %</text:p>
          </table:table-cell>
          <table:table-cell table:style-name="ce146" table:formula="of:=MULTIPLE.OPERATIONS([.$D$118];[.$D$25];[.$D125];[.$D$20];[.J$118])" office:value-type="percentage" office:value="0.125307503497751" calcext:value-type="percentage">
            <text:p>12.53 %</text:p>
          </table:table-cell>
          <table:table-cell table:style-name="ce146" table:formula="of:=MULTIPLE.OPERATIONS([.$D$118];[.$D$25];[.$D125];[.$D$20];[.K$118])" office:value-type="percentage" office:value="0.137762698699593" calcext:value-type="percentage">
            <text:p>13.78 %</text:p>
          </table:table-cell>
          <table:table-cell table:number-columns-repeated="16373"/>
        </table:table-row>
        <table:table-row table:style-name="ro1">
          <table:table-cell/>
          <table:table-cell table:style-name="ce33" office:value-type="string" calcext:value-type="string">
            <text:p>Comentario:</text:p>
          </table:table-cell>
          <table:table-cell table:style-name="ce33"/>
          <table:table-cell table:style-name="ce132"/>
          <table:table-cell table:style-name="ce148"/>
          <table:table-cell table:style-name="ce159" table:number-columns-repeated="2"/>
          <table:table-cell table:style-name="ce148"/>
          <table:table-cell table:style-name="ce183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33"/>
          <table:table-cell table:style-name="ce132"/>
          <table:table-cell table:style-name="ce148"/>
          <table:table-cell table:style-name="ce159" table:number-columns-repeated="2"/>
          <table:table-cell table:style-name="ce148"/>
          <table:table-cell table:style-name="ce183"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/>
          <table:table-cell table:style-name="ce34" office:value-type="string" calcext:value-type="string">
            <text:p>3.- ANALISIS DE ESCENARIOS</text:p>
          </table:table-cell>
          <table:table-cell table:style-name="ce34"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>
            <text:p>A. Escenario 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>
            <text:p>Variables Críticas</text:p>
          </table:table-cell>
          <table:table-cell table:style-name="ce87" office:value-type="string" calcext:value-type="string">
            <text:p>Probable</text:p>
          </table:table-cell>
          <table:table-cell table:style-name="ce87" office:value-type="string" calcext:value-type="string">
            <text:p>Optimista</text:p>
          </table:table-cell>
          <table:table-cell table:style-name="ce87" office:value-type="string" calcext:value-type="string">
            <text:p>Pesimista</text:p>
          </table:table-cell>
          <table:table-cell/>
          <table:table-cell table:style-name="ce167" office:value-type="string" calcext:value-type="string">
            <text:p>V. Resultado</text:p>
          </table:table-cell>
          <table:table-cell table:number-columns-repeated="16377"/>
        </table:table-row>
        <table:table-row table:style-name="ro1">
          <table:table-cell/>
          <table:table-cell table:style-name="ce53" office:value-type="string" calcext:value-type="string">
            <text:p>Precio Produto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8" calcext:value-type="float">
            <text:p>8</text:p>
          </table:table-cell>
          <table:table-cell/>
          <table:table-cell table:style-name="ce33" office:value-type="string" calcext:value-type="string">
            <text:p>VANE</text:p>
          </table:table-cell>
          <table:table-cell table:number-columns-repeated="16377"/>
        </table:table-row>
        <table:table-row table:style-name="ro1">
          <table:table-cell/>
          <table:table-cell table:style-name="ce53" office:value-type="string" calcext:value-type="string">
            <text:p>Tasa Crec. Dda</text:p>
          </table:table-cell>
          <table:table-cell table:style-name="ce88" office:value-type="percentage" office:value="0.08" calcext:value-type="percentage">
            <text:p>8 %</text:p>
          </table:table-cell>
          <table:table-cell table:style-name="ce88" office:value-type="percentage" office:value="0.09" calcext:value-type="percentage">
            <text:p>9 %</text:p>
          </table:table-cell>
          <table:table-cell table:style-name="ce88" office:value-type="percentage" office:value="0.07" calcext:value-type="percentage">
            <text:p>7 %</text:p>
          </table:table-cell>
          <table:table-cell/>
          <table:table-cell table:style-name="ce33" office:value-type="string" calcext:value-type="string">
            <text:p>TIRE</text:p>
          </table:table-cell>
          <table:table-cell table:number-columns-repeated="16377"/>
        </table:table-row>
        <table:table-row table:style-name="ro1">
          <table:table-cell/>
          <table:table-cell table:style-name="ce53" office:value-type="string" calcext:value-type="string">
            <text:p>Precio MP</text:p>
          </table:table-cell>
          <table:table-cell table:style-name="ce82" office:value-type="float" office:value="1.2" calcext:value-type="float">
            <text:p>1.2</text:p>
          </table:table-cell>
          <table:table-cell table:style-name="ce53" office:value-type="float" office:value="1.1" calcext:value-type="float">
            <text:p>1.1</text:p>
          </table:table-cell>
          <table:table-cell table:style-name="ce82" office:value-type="float" office:value="1.3" calcext:value-type="float">
            <text:p>1.3</text:p>
          </table:table-cell>
          <table:table-cell/>
          <table:table-cell table:style-name="ce168" office:value-type="string" calcext:value-type="string">
            <text:p>PEC</text:p>
          </table:table-cell>
          <table:table-cell table:number-columns-repeated="16377"/>
        </table:table-row>
        <table:table-row table:style-name="ro1">
          <table:table-cell/>
          <table:table-cell table:style-name="ce53" office:value-type="string" calcext:value-type="string">
            <text:p>Costo MO</text:p>
          </table:table-cell>
          <table:table-cell table:style-name="ce82" office:value-type="float" office:value="0.6" calcext:value-type="float">
            <text:p>0.6</text:p>
          </table:table-cell>
          <table:table-cell table:style-name="ce53" office:value-type="float" office:value="0.5" calcext:value-type="float">
            <text:p>0.5</text:p>
          </table:table-cell>
          <table:table-cell table:style-name="ce82" office:value-type="float" office:value="0.7" calcext:value-type="float">
            <text:p>0.7</text:p>
          </table:table-cell>
          <table:table-cell table:number-columns-repeated="16379"/>
        </table:table-row>
        <table:table-row table:style-name="ro1">
          <table:table-cell/>
          <table:table-cell table:style-name="ce53" office:value-type="string" calcext:value-type="string">
            <text:p>Costo Fijo</text:p>
          </table:table-cell>
          <table:table-cell table:style-name="ce82" office:value-type="float" office:value="45000" calcext:value-type="float">
            <text:p>45000</text:p>
          </table:table-cell>
          <table:table-cell table:style-name="ce82" office:value-type="float" office:value="42000" calcext:value-type="float">
            <text:p>42000</text:p>
          </table:table-cell>
          <table:table-cell table:style-name="ce82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>
            <text:p>B. Escenario 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3" office:value-type="string" calcext:value-type="string">
            <text:p>Variables Críticas</text:p>
          </table:table-cell>
          <table:table-cell table:style-name="ce87" office:value-type="string" calcext:value-type="string">
            <text:p>Probable</text:p>
          </table:table-cell>
          <table:table-cell table:style-name="ce87" office:value-type="string" calcext:value-type="string">
            <text:p>Optimista</text:p>
          </table:table-cell>
          <table:table-cell table:style-name="ce87" office:value-type="string" calcext:value-type="string">
            <text:p>Pesimista</text:p>
          </table:table-cell>
          <table:table-cell table:number-columns-repeated="16379"/>
        </table:table-row>
        <table:table-row table:style-name="ro1">
          <table:table-cell/>
          <table:table-cell table:style-name="ce53" office:value-type="string" calcext:value-type="string">
            <text:p>Precio Produto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9.5" calcext:value-type="float">
            <text:p>9.5</text:p>
          </table:table-cell>
          <table:table-cell table:style-name="ce82" office:value-type="float" office:value="8.5" calcext:value-type="float">
            <text:p>8.5</text:p>
          </table:table-cell>
          <table:table-cell table:number-columns-repeated="16379"/>
        </table:table-row>
        <table:table-row table:style-name="ro1">
          <table:table-cell/>
          <table:table-cell table:style-name="ce53" office:value-type="string" calcext:value-type="string">
            <text:p>Tasa Crec. Dda</text:p>
          </table:table-cell>
          <table:table-cell table:style-name="ce88" office:value-type="percentage" office:value="0.08" calcext:value-type="percentage">
            <text:p>8 %</text:p>
          </table:table-cell>
          <table:table-cell table:style-name="ce133" office:value-type="percentage" office:value="0.085" calcext:value-type="percentage">
            <text:p>8.5%</text:p>
          </table:table-cell>
          <table:table-cell table:style-name="ce133" office:value-type="percentage" office:value="0.075" calcext:value-type="percentage">
            <text:p>7.5%</text:p>
          </table:table-cell>
          <table:table-cell table:number-columns-repeated="16379"/>
        </table:table-row>
        <table:table-row table:style-name="ro1">
          <table:table-cell/>
          <table:table-cell table:style-name="ce53" office:value-type="string" calcext:value-type="string">
            <text:p>Precio MP</text:p>
          </table:table-cell>
          <table:table-cell table:style-name="ce82" office:value-type="float" office:value="1.2" calcext:value-type="float">
            <text:p>1.2</text:p>
          </table:table-cell>
          <table:table-cell table:style-name="ce53" office:value-type="float" office:value="1.1" calcext:value-type="float">
            <text:p>1.1</text:p>
          </table:table-cell>
          <table:table-cell table:style-name="ce82" office:value-type="float" office:value="1.3" calcext:value-type="float">
            <text:p>1.3</text:p>
          </table:table-cell>
          <table:table-cell table:number-columns-repeated="16379"/>
        </table:table-row>
        <table:table-row table:style-name="ro1">
          <table:table-cell/>
          <table:table-cell table:style-name="ce53" office:value-type="string" calcext:value-type="string">
            <text:p>Costo MO</text:p>
          </table:table-cell>
          <table:table-cell table:style-name="ce82" office:value-type="float" office:value="0.6" calcext:value-type="float">
            <text:p>0.6</text:p>
          </table:table-cell>
          <table:table-cell table:style-name="ce53" office:value-type="float" office:value="0.5" calcext:value-type="float">
            <text:p>0.5</text:p>
          </table:table-cell>
          <table:table-cell table:style-name="ce82" office:value-type="float" office:value="0.7" calcext:value-type="float">
            <text:p>0.7</text:p>
          </table:table-cell>
          <table:table-cell table:number-columns-repeated="16379"/>
        </table:table-row>
        <table:table-row table:style-name="ro1">
          <table:table-cell/>
          <table:table-cell table:style-name="ce53" office:value-type="string" calcext:value-type="string">
            <text:p>Costo Fijo</text:p>
          </table:table-cell>
          <table:table-cell table:style-name="ce82" office:value-type="float" office:value="45000" calcext:value-type="float">
            <text:p>45000</text:p>
          </table:table-cell>
          <table:table-cell table:style-name="ce82" office:value-type="float" office:value="44000" calcext:value-type="float">
            <text:p>44000</text:p>
          </table:table-cell>
          <table:table-cell table:style-name="ce82" office:value-type="float" office:value="46000" calcext:value-type="float">
            <text:p>46000</text:p>
          </table:table-cell>
          <table:table-cell table:number-columns-repeated="16379"/>
        </table:table-row>
        <table:table-row table:style-name="ro1" table:number-rows-repeated="104842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ensibilidad.E119:Sensibilidad.K125">
            <calcext:condition calcext:apply-style-name="ConditionalStyle_1" calcext:value="&gt;0.1" calcext:base-cell-address="Sensibilidad.E119"/>
          </calcext:conditional-format>
          <calcext:conditional-format calcext:target-range-address="Sensibilidad.E93:Sensibilidad.K99">
            <calcext:condition calcext:apply-style-name="ConditionalStyle_11" calcext:value="&gt;0" calcext:base-cell-address="Sensibilidad.E93"/>
            <calcext:condition calcext:apply-style-name="ConditionalStyle_10" calcext:value="&lt;0" calcext:base-cell-address="Sensibilidad.E93"/>
            <calcext:condition calcext:apply-style-name="ConditionalStyle_9" calcext:value="&gt;0" calcext:base-cell-address="Sensibilidad.E93"/>
          </calcext:conditional-format>
          <calcext:conditional-format calcext:target-range-address="Sensibilidad.F64:Sensibilidad.F68">
            <calcext:condition calcext:apply-style-name="ConditionalStyle_3" calcext:value="&lt;0" calcext:base-cell-address="Sensibilidad.F64"/>
            <calcext:condition calcext:apply-style-name="ConditionalStyle_2" calcext:value="&gt;0" calcext:base-cell-address="Sensibilidad.F64"/>
          </calcext:conditional-format>
          <calcext:conditional-format calcext:target-range-address="Sensibilidad.E119:Sensibilidad.K127">
            <calcext:condition calcext:apply-style-name="ConditionalStyle_5" calcext:value="&lt;0" calcext:base-cell-address="Sensibilidad.E119"/>
            <calcext:condition calcext:apply-style-name="ConditionalStyle_4" calcext:value="&gt;0" calcext:base-cell-address="Sensibilidad.E119"/>
          </calcext:conditional-format>
          <calcext:conditional-format calcext:target-range-address="Sensibilidad.F64:Sensibilidad.F69">
            <calcext:condition calcext:apply-style-name="ConditionalStyle_6" calcext:value="&gt;0" calcext:base-cell-address="Sensibilidad.F64"/>
          </calcext:conditional-format>
          <calcext:conditional-format calcext:target-range-address="Sensibilidad.D64:Sensibilidad.F69">
            <calcext:condition calcext:apply-style-name="ConditionalStyle_7" calcext:value="&lt;0" calcext:base-cell-address="Sensibilidad.D64"/>
          </calcext:conditional-format>
          <calcext:conditional-format calcext:target-range-address="Sensibilidad.E106:Sensibilidad.K112">
            <calcext:condition calcext:apply-style-name="ConditionalStyle_8" calcext:value="&lt;0" calcext:base-cell-address="Sensibilidad.E106"/>
          </calcext:conditional-format>
        </calcext:conditional-formats>
      </table:table>
      <table:table table:name="OPTIMISTA" table:style-name="ta4">
        <table:scenario table:display-border="false" table:border-color="#c0c0c0" table:copy-back="false" table:copy-styles="false" table:copy-formulas="false" table:protected="true" table:is-active="false" table:scenario-ranges="OPTIMISTA.D20:OPTIMISTA.D23 OPTIMISTA.D25:OPTIMISTA.D25" table:comment="Creado por Usuario el 9/07/2021"/>
        <table:table-column table:style-name="co5" table:default-cell-style-name="ce205"/>
        <table:table-column table:style-name="co6" table:default-cell-style-name="ce205"/>
        <table:table-column table:style-name="co7" table:default-cell-style-name="ce205"/>
        <table:table-column table:style-name="co8" table:default-cell-style-name="ce205"/>
        <table:table-column table:style-name="co9" table:default-cell-style-name="ce205"/>
        <table:table-column table:style-name="co10" table:default-cell-style-name="ce205"/>
        <table:table-column table:style-name="co11" table:default-cell-style-name="ce205"/>
        <table:table-column table:style-name="co12" table:default-cell-style-name="ce205"/>
        <table:table-column table:style-name="co11" table:default-cell-style-name="ce205"/>
        <table:table-column table:style-name="co13" table:default-cell-style-name="ce205"/>
        <table:table-column table:style-name="co14" table:default-cell-style-name="ce205"/>
        <table:table-column table:style-name="co15" table:default-cell-style-name="ce205"/>
        <table:table-column table:style-name="co5" table:number-columns-repeated="16372" table:default-cell-style-name="ce205"/>
        <table:table-row table:style-name="ro6" table:number-rows-repeated="19">
          <table:table-cell table:number-columns-repeated="16384"/>
        </table:table-row>
        <table:table-row table:style-name="ro6">
          <table:table-cell table:number-columns-repeated="3"/>
          <table:table-cell table:style-name="ce206" office:value-type="float" office:value="9.5" calcext:value-type="float">
            <text:p>9.5</text:p>
          </table:table-cell>
          <table:table-cell table:number-columns-repeated="16380"/>
        </table:table-row>
        <table:table-row table:style-name="ro6">
          <table:table-cell table:number-columns-repeated="3"/>
          <table:table-cell table:style-name="ce93" office:value-type="percentage" office:value="0.085" calcext:value-type="percentage">
            <text:p>8.50 %</text:p>
          </table:table-cell>
          <table:table-cell table:number-columns-repeated="16380"/>
        </table:table-row>
        <table:table-row table:style-name="ro6">
          <table:table-cell table:number-columns-repeated="3"/>
          <table:table-cell table:style-name="ce207" office:value-type="float" office:value="1.1" calcext:value-type="float">
            <text:p>1.1</text:p>
          </table:table-cell>
          <table:table-cell table:number-columns-repeated="16380"/>
        </table:table-row>
        <table:table-row table:style-name="ro6">
          <table:table-cell table:number-columns-repeated="3"/>
          <table:table-cell table:style-name="ce207" office:value-type="float" office:value="0.5" calcext:value-type="float">
            <text:p>0.5</text:p>
          </table:table-cell>
          <table:table-cell table:number-columns-repeated="16380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3"/>
          <table:table-cell table:style-name="ce208" office:value-type="float" office:value="44000" calcext:value-type="float">
            <text:p>44,000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1" table:number-rows-repeated="8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 table:number-rows-repeated="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5">
          <table:table-cell table:number-columns-repeated="3"/>
          <table:table-cell table:style-name="ce209" table:number-columns-repeated="2"/>
          <table:table-cell table:style-name="ce214"/>
          <table:table-cell table:number-columns-repeated="16378"/>
        </table:table-row>
        <table:table-row table:style-name="ro1">
          <table:table-cell table:number-columns-repeated="3"/>
          <table:table-cell table:style-name="ce209" table:number-columns-repeated="2"/>
          <table:table-cell table:style-name="ce215"/>
          <table:table-cell table:number-columns-repeated="16378"/>
        </table:table-row>
        <table:table-row table:style-name="ro1" table:number-rows-repeated="23">
          <table:table-cell table:number-columns-repeated="16384"/>
        </table:table-row>
        <table:table-row table:style-name="ro1" table:number-rows-repeated="7">
          <table:table-cell table:number-columns-repeated="4"/>
          <table:table-cell table:style-name="ce210" table:number-columns-repeated="7"/>
          <table:table-cell table:number-columns-repeated="16373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7">
          <table:table-cell table:number-columns-repeated="4"/>
          <table:table-cell table:style-name="ce211" table:number-columns-repeated="7"/>
          <table:table-cell table:number-columns-repeated="16373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7">
          <table:table-cell table:number-columns-repeated="4"/>
          <table:table-cell table:style-name="ce212" table:number-columns-repeated="7"/>
          <table:table-cell table:number-columns-repeated="16373"/>
        </table:table-row>
        <table:table-row table:style-name="ro1" table:number-rows-repeated="2">
          <table:table-cell table:number-columns-repeated="4"/>
          <table:table-cell table:style-name="ce213" table:number-columns-repeated="7"/>
          <table:table-cell table:number-columns-repeated="16373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Costo_Fijo" table:base-cell-address="$OPTIMISTA.$A$1" table:cell-range-address="$OPTIMISTA.$D$25"/>
          <table:named-range table:name="INVERSIÓN" table:base-cell-address="$OPTIMISTA.$A$1" table:cell-range-address="$OPTIMISTA.$D$53"/>
          <table:named-range table:name="Mano_de_Obra" table:base-cell-address="$OPTIMISTA.$A$1" table:cell-range-address="$OPTIMISTA.$D$23"/>
          <table:named-range table:name="Materia_Prima" table:base-cell-address="$OPTIMISTA.$A$1" table:cell-range-address="$OPTIMISTA.$D$22"/>
          <table:named-range table:name="Optimista" table:base-cell-address="$OPTIMISTA.$A$1" table:cell-range-address="$OPTIMISTA.$D$135"/>
          <table:named-range table:name="PEC" table:base-cell-address="$OPTIMISTA.$A$1" table:cell-range-address="$OPTIMISTA.$C$57"/>
          <table:named-range table:name="Precio" table:base-cell-address="$OPTIMISTA.$A$1" table:cell-range-address="$OPTIMISTA.$D$20"/>
          <table:named-range table:name="Tasa" table:base-cell-address="$OPTIMISTA.$A$1" table:cell-range-address="$OPTIMISTA.$D$21"/>
          <table:named-range table:name="TIR" table:base-cell-address="$OPTIMISTA.$A$1" table:cell-range-address="$OPTIMISTA.$C$55"/>
          <table:named-range table:name="TIRE" table:base-cell-address="$OPTIMISTA.$A$1" table:cell-range-address="$OPTIMISTA.$C$55"/>
          <table:named-range table:name="VAN" table:base-cell-address="$OPTIMISTA.$A$1" table:cell-range-address="$OPTIMISTA.$C$56"/>
        </table:named-expressions>
        <calcext:conditional-formats>
          <calcext:conditional-format calcext:target-range-address="OPTIMISTA.E119:OPTIMISTA.K125">
            <calcext:condition calcext:apply-style-name="ConditionalStyle_1" calcext:value="&gt;0.1" calcext:base-cell-address="OPTIMISTA.E119"/>
          </calcext:conditional-format>
          <calcext:conditional-format calcext:target-range-address="OPTIMISTA.E93:OPTIMISTA.K99">
            <calcext:condition calcext:apply-style-name="ConditionalStyle_11" calcext:value="&gt;0" calcext:base-cell-address="OPTIMISTA.E93"/>
            <calcext:condition calcext:apply-style-name="ConditionalStyle_10" calcext:value="&lt;0" calcext:base-cell-address="OPTIMISTA.E93"/>
            <calcext:condition calcext:apply-style-name="ConditionalStyle_9" calcext:value="&gt;0" calcext:base-cell-address="OPTIMISTA.E93"/>
          </calcext:conditional-format>
          <calcext:conditional-format calcext:target-range-address="OPTIMISTA.F64:OPTIMISTA.F68">
            <calcext:condition calcext:apply-style-name="ConditionalStyle_3" calcext:value="&lt;0" calcext:base-cell-address="OPTIMISTA.F64"/>
            <calcext:condition calcext:apply-style-name="ConditionalStyle_2" calcext:value="&gt;0" calcext:base-cell-address="OPTIMISTA.F64"/>
          </calcext:conditional-format>
          <calcext:conditional-format calcext:target-range-address="OPTIMISTA.E119:OPTIMISTA.K127">
            <calcext:condition calcext:apply-style-name="ConditionalStyle_5" calcext:value="&lt;0" calcext:base-cell-address="OPTIMISTA.E119"/>
            <calcext:condition calcext:apply-style-name="ConditionalStyle_4" calcext:value="&gt;0" calcext:base-cell-address="OPTIMISTA.E119"/>
          </calcext:conditional-format>
          <calcext:conditional-format calcext:target-range-address="OPTIMISTA.F64:OPTIMISTA.F69">
            <calcext:condition calcext:apply-style-name="ConditionalStyle_6" calcext:value="&gt;0" calcext:base-cell-address="OPTIMISTA.F64"/>
          </calcext:conditional-format>
          <calcext:conditional-format calcext:target-range-address="OPTIMISTA.D64:OPTIMISTA.F69">
            <calcext:condition calcext:apply-style-name="ConditionalStyle_7" calcext:value="&lt;0" calcext:base-cell-address="OPTIMISTA.D64"/>
          </calcext:conditional-format>
          <calcext:conditional-format calcext:target-range-address="OPTIMISTA.E106:OPTIMISTA.K112">
            <calcext:condition calcext:apply-style-name="ConditionalStyle_8" calcext:value="&lt;0" calcext:base-cell-address="OPTIMISTA.E106"/>
          </calcext:conditional-format>
        </calcext:conditional-formats>
      </table:table>
      <table:table table:name="PESIMISTA" table:style-name="ta4">
        <table:scenario table:display-border="false" table:border-color="#c0c0c0" table:copy-back="false" table:copy-styles="false" table:copy-formulas="false" table:protected="true" table:is-active="false" table:scenario-ranges="PESIMISTA.D20:PESIMISTA.D23 PESIMISTA.D25:PESIMISTA.D25" table:comment="Creado por Usuario el 9/07/2021"/>
        <table:table-column table:style-name="co5" table:default-cell-style-name="ce205"/>
        <table:table-column table:style-name="co6" table:default-cell-style-name="ce205"/>
        <table:table-column table:style-name="co7" table:default-cell-style-name="ce205"/>
        <table:table-column table:style-name="co8" table:default-cell-style-name="ce205"/>
        <table:table-column table:style-name="co9" table:default-cell-style-name="ce205"/>
        <table:table-column table:style-name="co10" table:default-cell-style-name="ce205"/>
        <table:table-column table:style-name="co11" table:default-cell-style-name="ce205"/>
        <table:table-column table:style-name="co12" table:default-cell-style-name="ce205"/>
        <table:table-column table:style-name="co11" table:default-cell-style-name="ce205"/>
        <table:table-column table:style-name="co13" table:default-cell-style-name="ce205"/>
        <table:table-column table:style-name="co14" table:default-cell-style-name="ce205"/>
        <table:table-column table:style-name="co15" table:default-cell-style-name="ce205"/>
        <table:table-column table:style-name="co5" table:number-columns-repeated="16372" table:default-cell-style-name="ce205"/>
        <table:table-row table:style-name="ro6" table:number-rows-repeated="19">
          <table:table-cell table:number-columns-repeated="16384"/>
        </table:table-row>
        <table:table-row table:style-name="ro6">
          <table:table-cell table:number-columns-repeated="3"/>
          <table:table-cell table:style-name="ce206" office:value-type="float" office:value="8.5" calcext:value-type="float">
            <text:p>8.5</text:p>
          </table:table-cell>
          <table:table-cell table:number-columns-repeated="16380"/>
        </table:table-row>
        <table:table-row table:style-name="ro6">
          <table:table-cell table:number-columns-repeated="3"/>
          <table:table-cell table:style-name="ce93" office:value-type="percentage" office:value="0.075" calcext:value-type="percentage">
            <text:p>7.50 %</text:p>
          </table:table-cell>
          <table:table-cell table:number-columns-repeated="16380"/>
        </table:table-row>
        <table:table-row table:style-name="ro6">
          <table:table-cell table:number-columns-repeated="3"/>
          <table:table-cell table:style-name="ce207" office:value-type="float" office:value="1.3" calcext:value-type="float">
            <text:p>1.3</text:p>
          </table:table-cell>
          <table:table-cell table:number-columns-repeated="16380"/>
        </table:table-row>
        <table:table-row table:style-name="ro6">
          <table:table-cell table:number-columns-repeated="3"/>
          <table:table-cell table:style-name="ce207" office:value-type="float" office:value="0.7" calcext:value-type="float">
            <text:p>0.7</text:p>
          </table:table-cell>
          <table:table-cell table:number-columns-repeated="16380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3"/>
          <table:table-cell table:style-name="ce208" office:value-type="float" office:value="46000" calcext:value-type="float">
            <text:p>46,000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1" table:number-rows-repeated="8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 table:number-rows-repeated="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5">
          <table:table-cell table:number-columns-repeated="3"/>
          <table:table-cell table:style-name="ce216" table:number-columns-repeated="2"/>
          <table:table-cell table:style-name="ce221"/>
          <table:table-cell table:number-columns-repeated="16378"/>
        </table:table-row>
        <table:table-row table:style-name="ro1">
          <table:table-cell table:number-columns-repeated="3"/>
          <table:table-cell table:style-name="ce216" table:number-columns-repeated="2"/>
          <table:table-cell table:style-name="ce222"/>
          <table:table-cell table:number-columns-repeated="16378"/>
        </table:table-row>
        <table:table-row table:style-name="ro1" table:number-rows-repeated="23">
          <table:table-cell table:number-columns-repeated="16384"/>
        </table:table-row>
        <table:table-row table:style-name="ro1" table:number-rows-repeated="7">
          <table:table-cell table:number-columns-repeated="4"/>
          <table:table-cell table:style-name="ce217" table:number-columns-repeated="7"/>
          <table:table-cell table:number-columns-repeated="16373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7">
          <table:table-cell table:number-columns-repeated="4"/>
          <table:table-cell table:style-name="ce218" table:number-columns-repeated="7"/>
          <table:table-cell table:number-columns-repeated="16373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7">
          <table:table-cell table:number-columns-repeated="4"/>
          <table:table-cell table:style-name="ce219" table:number-columns-repeated="7"/>
          <table:table-cell table:number-columns-repeated="16373"/>
        </table:table-row>
        <table:table-row table:style-name="ro1" table:number-rows-repeated="2">
          <table:table-cell table:number-columns-repeated="4"/>
          <table:table-cell table:style-name="ce220" table:number-columns-repeated="7"/>
          <table:table-cell table:number-columns-repeated="16373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Costo_Fijo" table:base-cell-address="$PESIMISTA.$A$1" table:cell-range-address="$PESIMISTA.$D$25"/>
          <table:named-range table:name="INVERSIÓN" table:base-cell-address="$PESIMISTA.$A$1" table:cell-range-address="$PESIMISTA.$D$53"/>
          <table:named-range table:name="Mano_de_Obra" table:base-cell-address="$PESIMISTA.$A$1" table:cell-range-address="$PESIMISTA.$D$23"/>
          <table:named-range table:name="Materia_Prima" table:base-cell-address="$PESIMISTA.$A$1" table:cell-range-address="$PESIMISTA.$D$22"/>
          <table:named-range table:name="Optimista" table:base-cell-address="$PESIMISTA.$A$1" table:cell-range-address="$PESIMISTA.$D$135"/>
          <table:named-range table:name="PEC" table:base-cell-address="$PESIMISTA.$A$1" table:cell-range-address="$PESIMISTA.$C$57"/>
          <table:named-range table:name="Precio" table:base-cell-address="$PESIMISTA.$A$1" table:cell-range-address="$PESIMISTA.$D$20"/>
          <table:named-range table:name="Tasa" table:base-cell-address="$PESIMISTA.$A$1" table:cell-range-address="$PESIMISTA.$D$21"/>
          <table:named-range table:name="TIR" table:base-cell-address="$PESIMISTA.$A$1" table:cell-range-address="$PESIMISTA.$C$55"/>
          <table:named-range table:name="TIRE" table:base-cell-address="$PESIMISTA.$A$1" table:cell-range-address="$PESIMISTA.$C$55"/>
          <table:named-range table:name="VAN" table:base-cell-address="$PESIMISTA.$A$1" table:cell-range-address="$PESIMISTA.$C$56"/>
        </table:named-expressions>
        <calcext:conditional-formats>
          <calcext:conditional-format calcext:target-range-address="PESIMISTA.E119:PESIMISTA.K125">
            <calcext:condition calcext:apply-style-name="ConditionalStyle_1" calcext:value="&gt;0.1" calcext:base-cell-address="PESIMISTA.E119"/>
          </calcext:conditional-format>
          <calcext:conditional-format calcext:target-range-address="PESIMISTA.E93:PESIMISTA.K99">
            <calcext:condition calcext:apply-style-name="ConditionalStyle_11" calcext:value="&gt;0" calcext:base-cell-address="PESIMISTA.E93"/>
            <calcext:condition calcext:apply-style-name="ConditionalStyle_10" calcext:value="&lt;0" calcext:base-cell-address="PESIMISTA.E93"/>
            <calcext:condition calcext:apply-style-name="ConditionalStyle_9" calcext:value="&gt;0" calcext:base-cell-address="PESIMISTA.E93"/>
          </calcext:conditional-format>
          <calcext:conditional-format calcext:target-range-address="PESIMISTA.F64:PESIMISTA.F68">
            <calcext:condition calcext:apply-style-name="ConditionalStyle_3" calcext:value="&lt;0" calcext:base-cell-address="PESIMISTA.F64"/>
            <calcext:condition calcext:apply-style-name="ConditionalStyle_2" calcext:value="&gt;0" calcext:base-cell-address="PESIMISTA.F64"/>
          </calcext:conditional-format>
          <calcext:conditional-format calcext:target-range-address="PESIMISTA.E119:PESIMISTA.K127">
            <calcext:condition calcext:apply-style-name="ConditionalStyle_5" calcext:value="&lt;0" calcext:base-cell-address="PESIMISTA.E119"/>
            <calcext:condition calcext:apply-style-name="ConditionalStyle_4" calcext:value="&gt;0" calcext:base-cell-address="PESIMISTA.E119"/>
          </calcext:conditional-format>
          <calcext:conditional-format calcext:target-range-address="PESIMISTA.F64:PESIMISTA.F69">
            <calcext:condition calcext:apply-style-name="ConditionalStyle_6" calcext:value="&gt;0" calcext:base-cell-address="PESIMISTA.F64"/>
          </calcext:conditional-format>
          <calcext:conditional-format calcext:target-range-address="PESIMISTA.D64:PESIMISTA.F69">
            <calcext:condition calcext:apply-style-name="ConditionalStyle_7" calcext:value="&lt;0" calcext:base-cell-address="PESIMISTA.D64"/>
          </calcext:conditional-format>
          <calcext:conditional-format calcext:target-range-address="PESIMISTA.E106:PESIMISTA.K112">
            <calcext:condition calcext:apply-style-name="ConditionalStyle_8" calcext:value="&lt;0" calcext:base-cell-address="PESIMISTA.E106"/>
          </calcext:conditional-format>
        </calcext:conditional-formats>
      </table:table>
      <table:named-expressions>
        <table:named-range table:name="Costo_Fijo" table:base-cell-address="$'Escenario 1'.$A$1" table:cell-range-address="$Sensibilidad.$D$25"/>
        <table:named-range table:name="INVERSIÓN" table:base-cell-address="$'Escenario 1'.$A$1" table:cell-range-address="$Sensibilidad.$D$53"/>
        <table:named-range table:name="Mano_de_Obra" table:base-cell-address="$'Escenario 1'.$A$1" table:cell-range-address="$Sensibilidad.$D$23"/>
        <table:named-range table:name="Materia_Prima" table:base-cell-address="$'Escenario 1'.$A$1" table:cell-range-address="$Sensibilidad.$D$22"/>
        <table:named-range table:name="Optimista" table:base-cell-address="$'Escenario 1'.$A$1" table:cell-range-address="$Sensibilidad.$D$135"/>
        <table:named-range table:name="PEC" table:base-cell-address="$'Escenario 1'.$A$1" table:cell-range-address="$Sensibilidad.$C$57"/>
        <table:named-range table:name="Precio" table:base-cell-address="$'Escenario 1'.$A$1" table:cell-range-address="$Sensibilidad.$D$20"/>
        <table:named-range table:name="Tasa" table:base-cell-address="$'Escenario 1'.$A$1" table:cell-range-address="$Sensibilidad.$D$21"/>
        <table:named-range table:name="TIR" table:base-cell-address="$'Escenario 1'.$A$1" table:cell-range-address="$Sensibilidad.$C$55"/>
        <table:named-range table:name="TIRE" table:base-cell-address="$'Escenario 1'.$A$1" table:cell-range-address="$Sensibilidad.$C$55"/>
        <table:named-range table:name="VAN" table:base-cell-address="$'Escenario 1'.$A$1" table:cell-range-address="$Sensibilidad.$C$5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feb9c"/>
      <style:text-properties fo:color="#9c57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cenario_20_1" style:display-name="PageStyle_Escenari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CENARIO_20_2" style:display-name="PageStyle_eSCENARIO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sibilidad" style:display-name="PageStyle_Sensibilid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sonal Autorizado</meta:initial-creator>
    <dc:creator>E. Edison Achalma Mendoza</dc:creator>
    <meta:creation-date>2004-03-14T01:56:03</meta:creation-date>
    <dc:date>2022-07-13T00:00:33</dc:date>
    <meta:generator>LibreOffice/24.2.4.2$Linux_X86_64 LibreOffice_project/420$Build-2</meta:generator>
    <meta:document-statistic meta:table-count="5" meta:cell-count="670" meta:object-count="0"/>
    <meta:user-defined meta:name="AppVersion">16.0300</meta:user-defined>
    <meta:user-defined meta:name="Company">Personal Autorizado</meta:user-defined>
  </office:meta>
</office:document-meta>
</file>