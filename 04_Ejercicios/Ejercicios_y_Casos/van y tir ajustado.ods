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4.364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2.1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PageStyle_5f_TIRAjustado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4454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ce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4454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4454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ce13" style:family="table-cell" style:parent-style-name="Default" style:data-style-name="N10">
      <style:table-cell-properties style:rotation-align="none"/>
    </style:style>
    <style:style style:name="ce14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11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11">
      <style:table-cell-properties fo:background-color="transparent" style:rotation-align="none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9" style:family="table-cell" style:parent-style-name="Default">
      <style:table-cell-properties style:diagonal-bl-tr="none" style:diagonal-tl-br="none" fo:border="0.74pt solid #000000" style:rotation-align="none"/>
    </style:style>
    <style:style style:name="ce20" style:family="table-cell" style:parent-style-name="Default" style:data-style-name="N135">
      <style:table-cell-properties style:rotation-align="none"/>
    </style:style>
    <style:style style:name="ce21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Excel_20_Built-in_20_Comma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117">
      <style:table-cell-properties style:rotation-align="none"/>
    </style:style>
    <style:style style:name="ce24" style:family="table-cell" style:parent-style-name="Default" style:data-style-name="N11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136">
      <style:table-cell-properties style:diagonal-bl-tr="none" style:diagonal-tl-br="none" fo:border="0.74pt solid #000000" style:rotation-align="none"/>
    </style:style>
    <style:style style:name="ce27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4454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4454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ce3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33" style:family="table-cell" style:parent-style-name="Default" style:data-style-name="N136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4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1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4454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ce36" style:family="table-cell" style:parent-style-name="Default" style:data-style-name="N1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RAjustad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6375" table:default-cell-style-name="Default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7" table:number-rows-spanned="1">
            <text:p>TASA INTERNA DE RETORNO AJUSTADO</text:p>
          </table:table-cell>
          <table:covered-table-cell table:number-columns-repeated="6" table:style-name="ce10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>
            <text:p>RUBRO/PERIODO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D4]+1" office:value-type="float" office:value="1" calcext:value-type="float">
            <text:p>1</text:p>
          </table:table-cell>
          <table:table-cell table:style-name="ce11" table:formula="of:=[.E4]+1" office:value-type="float" office:value="2" calcext:value-type="float">
            <text:p>2</text:p>
          </table:table-cell>
          <table:table-cell table:style-name="ce11" table:formula="of:=[.F4]+1" office:value-type="float" office:value="3" calcext:value-type="float">
            <text:p>3</text:p>
          </table:table-cell>
          <table:table-cell table:style-name="ce11" table:formula="of:=[.G4]+1" office:value-type="float" office:value="4" calcext:value-type="float">
            <text:p>4</text:p>
          </table:table-cell>
          <table:table-cell table:style-name="ce29" table:formula="of:=[.H4]+1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string" calcext:value-type="string">
            <text:p>FCE</text:p>
          </table:table-cell>
          <table:table-cell table:style-name="ce12" office:value-type="float" office:value="-40000" calcext:value-type="float">
            <text:p>-40000</text:p>
          </table:table-cell>
          <table:table-cell table:style-name="ce12" office:value-type="float" office:value="10960" calcext:value-type="float">
            <text:p>10960</text:p>
          </table:table-cell>
          <table:table-cell table:style-name="ce12" office:value-type="float" office:value="12696" calcext:value-type="float">
            <text:p>12696</text:p>
          </table:table-cell>
          <table:table-cell table:style-name="ce12" office:value-type="float" office:value="14606" calcext:value-type="float">
            <text:p>14606</text:p>
          </table:table-cell>
          <table:table-cell table:style-name="ce12" office:value-type="float" office:value="16706" calcext:value-type="float">
            <text:p>16706</text:p>
          </table:table-cell>
          <table:table-cell table:style-name="ce30" office:value-type="float" office:value="29017" calcext:value-type="float">
            <text:p>29017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Ku</text:p>
          </table:table-cell>
          <table:table-cell table:style-name="ce13" office:value-type="percentage" office:value="0.13" calcext:value-type="percentage">
            <text:p>13 %</text:p>
          </table:table-cell>
          <table:table-cell office:value-type="string" calcext:value-type="string">
            <text:p>Rentabilidad mínima exigida para el proyec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VANE</text:p>
          </table:table-cell>
          <table:table-cell table:style-name="ce14" table:formula="of:=NPV([.D6];[.E5:.I5])+[.D5]" office:value-type="float" office:value="15760.0037340972" calcext:value-type="float">
            <text:p>S/15,760</text:p>
          </table:table-cell>
          <table:table-cell office:value-type="string" calcext:value-type="string">
            <text:p>Valor creado por la operación del proyecto financiado 100% Capital propi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TIRE</text:p>
          </table:table-cell>
          <table:table-cell table:style-name="ce15" table:formula="of:=IRR([.D5:.I5])" office:value-type="percentage" office:value="0.257488061798781" calcext:value-type="percentage">
            <text:p>25.75 %</text:p>
          </table:table-cell>
          <table:table-cell office:value-type="string" calcext:value-type="string">
            <text:p>La rentabilidad promedio es 25.75%, mayor a 13% (rentabilidad minima exigida)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6"/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RUBRO/PERIOD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0]+1" office:value-type="float" office:value="1" calcext:value-type="float">
            <text:p>1</text:p>
          </table:table-cell>
          <table:table-cell table:style-name="ce17" table:formula="of:=[.E10]+1" office:value-type="float" office:value="2" calcext:value-type="float">
            <text:p>2</text:p>
          </table:table-cell>
          <table:table-cell table:style-name="ce17" table:formula="of:=[.F10]+1" office:value-type="float" office:value="3" calcext:value-type="float">
            <text:p>3</text:p>
          </table:table-cell>
          <table:table-cell table:style-name="ce17" table:formula="of:=[.G10]+1" office:value-type="float" office:value="4" calcext:value-type="float">
            <text:p>4</text:p>
          </table:table-cell>
          <table:table-cell table:style-name="ce31" table:formula="of:=[.H10]+1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5" office:value-type="string" calcext:value-type="string">
            <text:p>Préstamo</text:p>
          </table:table-cell>
          <table:table-cell table:style-name="ce18" office:value-type="float" office:value="16000" calcext:value-type="float">
            <text:p>16000</text:p>
          </table:table-cell>
          <table:table-cell table:style-name="ce18" table:number-columns-repeated="4"/>
          <table:table-cell table:style-name="ce3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string" calcext:value-type="string">
            <text:p>Devolución del capital</text:p>
          </table:table-cell>
          <table:table-cell table:style-name="ce19"/>
          <table:table-cell table:style-name="ce26" table:formula="of:=-([.E18]+[.E13])" office:value-type="float" office:value="-2620.75969271593" calcext:value-type="float">
            <text:p>-2,621 </text:p>
          </table:table-cell>
          <table:table-cell table:style-name="ce26" table:formula="of:=-([.F18]+[.F13])" office:value-type="float" office:value="-2882.83566198752" calcext:value-type="float">
            <text:p>-2,883 </text:p>
          </table:table-cell>
          <table:table-cell table:style-name="ce26" table:formula="of:=-([.G18]+[.G13])" office:value-type="float" office:value="-3171.11922818627" calcext:value-type="float">
            <text:p>-3,171 </text:p>
          </table:table-cell>
          <table:table-cell table:style-name="ce26" table:formula="of:=-([.H18]+[.H13])" office:value-type="float" office:value="-3488.2311510049" calcext:value-type="float">
            <text:p>-3,488 </text:p>
          </table:table-cell>
          <table:table-cell table:style-name="ce33" table:formula="of:=-([.I18]+[.I13])" office:value-type="float" office:value="-3837.05426610539" calcext:value-type="float">
            <text:p>-3,837 </text:p>
          </table:table-cell>
          <table:table-cell table:style-name="ce36"/>
          <table:table-cell table:number-columns-repeated="16374"/>
        </table:table-row>
        <table:table-row table:style-name="ro1">
          <table:table-cell table:number-columns-repeated="2"/>
          <table:table-cell table:style-name="ce6" office:value-type="string" calcext:value-type="string">
            <text:p>Interés</text:p>
          </table:table-cell>
          <table:table-cell table:style-name="ce19"/>
          <table:table-cell table:style-name="ce19" table:formula="of:=-[.D11]*[.D16]" office:value-type="float" office:value="-1600" calcext:value-type="float">
            <text:p>-1600</text:p>
          </table:table-cell>
          <table:table-cell table:style-name="ce26" table:formula="of:=-[.D16]*([.D11]+[.E12])" office:value-type="float" office:value="-1337.92403072841" calcext:value-type="float">
            <text:p>-1,338 </text:p>
          </table:table-cell>
          <table:table-cell table:style-name="ce26" table:formula="of:=-[.D16]*([.D11]+[.E12]+[.F12])" office:value-type="float" office:value="-1049.64046452966" calcext:value-type="float">
            <text:p>-1,050 </text:p>
          </table:table-cell>
          <table:table-cell table:style-name="ce26" table:formula="of:=-[.D16]*([.D11]+[.E12]+[.F12]+[.G12])" office:value-type="float" office:value="-732.528541711028" calcext:value-type="float">
            <text:p>-733 </text:p>
          </table:table-cell>
          <table:table-cell table:style-name="ce33" table:formula="of:=-[.D16]*([.D11]+[.E12]+[.F12]+[.G12]+[.H12])" office:value-type="float" office:value="-383.705426610538" calcext:value-type="float">
            <text:p>-384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7" office:value-type="string" calcext:value-type="string">
            <text:p>Escudo fiscal interés</text:p>
          </table:table-cell>
          <table:table-cell table:style-name="ce19"/>
          <table:table-cell table:style-name="ce27" table:formula="of:=-[.E13]*[.$G$16]" office:value-type="float" office:value="472" calcext:value-type="float">
            <text:p>472</text:p>
          </table:table-cell>
          <table:table-cell table:style-name="ce27" table:formula="of:=-[.F13]*[.$G$16]" office:value-type="float" office:value="394.68758906488" calcext:value-type="float">
            <text:p>395</text:p>
          </table:table-cell>
          <table:table-cell table:style-name="ce27" table:formula="of:=-[.G13]*[.$G$16]" office:value-type="float" office:value="309.643937036248" calcext:value-type="float">
            <text:p>310</text:p>
          </table:table-cell>
          <table:table-cell table:style-name="ce27" table:formula="of:=-[.H13]*[.$G$16]" office:value-type="float" office:value="216.095919804753" calcext:value-type="float">
            <text:p>216</text:p>
          </table:table-cell>
          <table:table-cell table:style-name="ce34" table:formula="of:=-[.I13]*[.$G$16]" office:value-type="float" office:value="113.193100850109" calcext:value-type="float">
            <text:p>113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8" office:value-type="string" calcext:value-type="string">
            <text:p>Flujo de la Deuda</text:p>
          </table:table-cell>
          <table:table-cell table:style-name="ce12" table:formula="of:=SUM([.D11:.D14])" office:value-type="float" office:value="16000" calcext:value-type="float">
            <text:p>16000</text:p>
          </table:table-cell>
          <table:table-cell table:style-name="ce28" table:formula="of:=SUM([.E11:.E14])" office:value-type="float" office:value="-3748.75969271593" calcext:value-type="float">
            <text:p>-3749</text:p>
          </table:table-cell>
          <table:table-cell table:style-name="ce28" table:formula="of:=SUM([.F11:.F14])" office:value-type="float" office:value="-3826.07210365105" calcext:value-type="float">
            <text:p>-3826</text:p>
          </table:table-cell>
          <table:table-cell table:style-name="ce28" table:formula="of:=SUM([.G11:.G14])" office:value-type="float" office:value="-3911.11575567968" calcext:value-type="float">
            <text:p>-3911</text:p>
          </table:table-cell>
          <table:table-cell table:style-name="ce28" table:formula="of:=SUM([.H11:.H14])" office:value-type="float" office:value="-4004.66377291117" calcext:value-type="float">
            <text:p>-4005</text:p>
          </table:table-cell>
          <table:table-cell table:style-name="ce35" table:formula="of:=SUM([.I11:.I14])" office:value-type="float" office:value="-4107.56659186582" calcext:value-type="float">
            <text:p>-4108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kd=</text:p>
          </table:table-cell>
          <table:table-cell table:style-name="ce20" office:value-type="percentage" office:value="0.1" calcext:value-type="percentage">
            <text:p>10.0%</text:p>
          </table:table-cell>
          <table:table-cell/>
          <table:table-cell office:value-type="string" calcext:value-type="string">
            <text:p>t</text:p>
          </table:table-cell>
          <table:table-cell table:style-name="ce20" office:value-type="percentage" office:value="0.295" calcext:value-type="percentage">
            <text:p>29.5%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Periodo de pago</text:p>
          </table:table-cell>
          <table:table-cell table:style-name="ce21" office:value-type="float" office:value="5" calcext:value-type="float">
            <text:p><text:s/>5.00 </text:p>
          </table:table-cell>
          <table:table-cell table:number-columns-repeated="2"/>
          <table:table-cell table:style-name="ce20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PAGO</text:p>
          </table:table-cell>
          <table:table-cell table:style-name="ce22"/>
          <table:table-cell table:style-name="ce22" table:formula="of:=-PMT([.$D$16];[.$D$17];[.$D$11])" office:value-type="float" office:value="4220.75969271593" calcext:value-type="float">
            <text:p><text:s/>4,221 </text:p>
          </table:table-cell>
          <table:table-cell table:style-name="ce22" table:formula="of:=-PMT([.$D$16];[.$D$17];[.$D$11])" office:value-type="float" office:value="4220.75969271593" calcext:value-type="float">
            <text:p><text:s/>4,221 </text:p>
          </table:table-cell>
          <table:table-cell table:style-name="ce22" table:formula="of:=-PMT([.$D$16];[.$D$17];[.$D$11])" office:value-type="float" office:value="4220.75969271593" calcext:value-type="float">
            <text:p><text:s/>4,221 </text:p>
          </table:table-cell>
          <table:table-cell table:style-name="ce22" table:formula="of:=-PMT([.$D$16];[.$D$17];[.$D$11])" office:value-type="float" office:value="4220.75969271593" calcext:value-type="float">
            <text:p><text:s/>4,221 </text:p>
          </table:table-cell>
          <table:table-cell table:style-name="ce22" table:formula="of:=-PMT([.$D$16];[.$D$17];[.$D$11])" office:value-type="float" office:value="4220.75969271593" calcext:value-type="float">
            <text:p><text:s/>4,221 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EFI =</text:p>
          </table:table-cell>
          <table:table-cell table:style-name="ce14" table:formula="of:=NPV([.D16];[.E14:.I14])" office:value-type="float" office:value="1205.7995029491" calcext:value-type="float">
            <text:p>S/1,206</text:p>
          </table:table-cell>
          <table:table-cell office:value-type="string" calcext:value-type="string">
            <text:p>Valor creado por el financiamiento via deuda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23"/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RUBRO/PERIODO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D22]+1" office:value-type="float" office:value="1" calcext:value-type="float">
            <text:p>1</text:p>
          </table:table-cell>
          <table:table-cell table:style-name="ce11" table:formula="of:=[.E22]+1" office:value-type="float" office:value="2" calcext:value-type="float">
            <text:p>2</text:p>
          </table:table-cell>
          <table:table-cell table:style-name="ce11" table:formula="of:=[.F22]+1" office:value-type="float" office:value="3" calcext:value-type="float">
            <text:p>3</text:p>
          </table:table-cell>
          <table:table-cell table:style-name="ce11" table:formula="of:=[.G22]+1" office:value-type="float" office:value="4" calcext:value-type="float">
            <text:p>4</text:p>
          </table:table-cell>
          <table:table-cell table:style-name="ce29" table:formula="of:=[.H22]+1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8" office:value-type="string" calcext:value-type="string">
            <text:p>Flujo de Caja Financiero</text:p>
          </table:table-cell>
          <table:table-cell table:style-name="ce12" table:formula="of:=[.D5]+[.D15]" office:value-type="float" office:value="-24000" calcext:value-type="float">
            <text:p>-24000</text:p>
          </table:table-cell>
          <table:table-cell table:style-name="ce28" table:formula="of:=[.E5]+[.E15]" office:value-type="float" office:value="7211.24030728407" calcext:value-type="float">
            <text:p>7211</text:p>
          </table:table-cell>
          <table:table-cell table:style-name="ce28" table:formula="of:=[.F5]+[.F15]" office:value-type="float" office:value="8869.92789634895" calcext:value-type="float">
            <text:p>8870</text:p>
          </table:table-cell>
          <table:table-cell table:style-name="ce28" table:formula="of:=[.G5]+[.G15]" office:value-type="float" office:value="10694.8842443203" calcext:value-type="float">
            <text:p>10695</text:p>
          </table:table-cell>
          <table:table-cell table:style-name="ce28" table:formula="of:=[.H5]+[.H15]" office:value-type="float" office:value="12701.3362270888" calcext:value-type="float">
            <text:p>12701</text:p>
          </table:table-cell>
          <table:table-cell table:style-name="ce28" table:formula="of:=[.I5]+[.I15]" office:value-type="float" office:value="24909.4334081342" calcext:value-type="float">
            <text:p>24909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TIRF =</text:p>
          </table:table-cell>
          <table:table-cell table:style-name="ce15" table:formula="of:=IRR([.D23:.I23])" office:value-type="percentage" office:value="0.348760939769377" calcext:value-type="percentage">
            <text:p>34.88 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9" office:value-type="string" calcext:value-type="string">
            <text:p>FC Ajustado1 *</text:p>
          </table:table-cell>
          <table:table-cell table:style-name="ce24" table:formula="of:=[.D5]+[.D14]" office:value-type="float" office:value="-40000" calcext:value-type="float">
            <text:p>-S/40,000</text:p>
          </table:table-cell>
          <table:table-cell table:style-name="ce24" table:formula="of:=[.E5]+[.E14]" office:value-type="float" office:value="11432" calcext:value-type="float">
            <text:p>S/11,432</text:p>
          </table:table-cell>
          <table:table-cell table:style-name="ce24" table:formula="of:=[.F5]+[.F14]" office:value-type="float" office:value="13090.6875890649" calcext:value-type="float">
            <text:p>S/13,091</text:p>
          </table:table-cell>
          <table:table-cell table:style-name="ce24" table:formula="of:=[.G5]+[.G14]" office:value-type="float" office:value="14915.6439370362" calcext:value-type="float">
            <text:p>S/14,916</text:p>
          </table:table-cell>
          <table:table-cell table:style-name="ce24" table:formula="of:=[.H5]+[.H14]" office:value-type="float" office:value="16922.0959198048" calcext:value-type="float">
            <text:p>S/16,922</text:p>
          </table:table-cell>
          <table:table-cell table:style-name="ce24" table:formula="of:=[.I5]+[.I14]" office:value-type="float" office:value="29130.1931008501" calcext:value-type="float">
            <text:p>S/29,13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(*) igual al FCE + Escudo fiscal del interé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TIR Ajustado 1</text:p>
          </table:table-cell>
          <table:table-cell table:style-name="ce15" table:formula="of:=IRR([.D25:.I25])" office:value-type="percentage" office:value="0.266997800641625" calcext:value-type="percentage">
            <text:p>26.70 %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VAN AJUSTADO= VANF</text:p>
          </table:table-cell>
          <table:table-cell table:style-name="ce25" table:formula="of:=[.D7]+[.D20]" office:value-type="float" office:value="16965.8032370463" calcext:value-type="float">
            <text:p>S/16,965.80</text:p>
          </table:table-cell>
          <table:table-cell office:value-type="string" calcext:value-type="string">
            <text:p>Rentabilidad Financiera es mayor a la rentabilidad económica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9" office:value-type="string" calcext:value-type="string">
            <text:p>FC Ajustado 2**</text:p>
          </table:table-cell>
          <table:table-cell table:style-name="ce24" table:formula="of:=[.D5]+[.D20]" office:value-type="float" office:value="-38794.2004970509" calcext:value-type="float">
            <text:p>-S/38,794</text:p>
          </table:table-cell>
          <table:table-cell table:style-name="ce9" table:formula="of:=[.E5]" office:value-type="float" office:value="10960" calcext:value-type="float">
            <text:p>10960</text:p>
          </table:table-cell>
          <table:table-cell table:style-name="ce9" table:formula="of:=[.F5]" office:value-type="float" office:value="12696" calcext:value-type="float">
            <text:p>12696</text:p>
          </table:table-cell>
          <table:table-cell table:style-name="ce9" table:formula="of:=[.G5]" office:value-type="float" office:value="14606" calcext:value-type="float">
            <text:p>14606</text:p>
          </table:table-cell>
          <table:table-cell table:style-name="ce9" table:formula="of:=[.H5]" office:value-type="float" office:value="16706" calcext:value-type="float">
            <text:p>16706</text:p>
          </table:table-cell>
          <table:table-cell table:style-name="ce9" table:formula="of:=[.I5]" office:value-type="float" office:value="29017" calcext:value-type="float">
            <text:p>29017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(**) en periodo cero se suma Inversión total + VAEFI, en el resto es FC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TIR Ajustado 2</text:p>
          </table:table-cell>
          <table:table-cell table:style-name="ce15" table:formula="of:=IRR([.D30:.I30])" office:value-type="percentage" office:value="0.270467045970624" calcext:value-type="percentage">
            <text:p>27.05 %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Rentabilidad Financiera es mayor que la rentabilidad economic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VANF &gt; VAN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TIRFE &gt; TIRE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S/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S/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S/. 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text>S/.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34P0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7"/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IRAjustado" style:display-name="PageStyle_TIRAjustad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dc:creator>Usuario</dc:creator>
    <meta:creation-date>2015-06-05T18:17:20</meta:creation-date>
    <dc:date>2021-07-02T15:48:45</dc:date>
    <meta:generator>LibreOffice/24.2.4.2$Linux_X86_64 LibreOffice_project/420$Build-2</meta:generator>
    <meta:document-statistic meta:table-count="1" meta:cell-count="115" meta:object-count="0"/>
    <meta:user-defined meta:name="AppVersion">16.0300</meta:user-defined>
  </office:meta>
</office:document-meta>
</file>