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33340000398D00000C146100DCEB.emf" manifest:media-type="image/x-emf"/>
  <manifest:file-entry manifest:full-path="Pictures/100000010000022D0000007598C74C57.png" manifest:media-type="image/png"/>
  <manifest:file-entry manifest:full-path="Pictures/100000010000017D00000093B083BDF5.png" manifest:media-type="image/png"/>
  <manifest:file-entry manifest:full-path="Pictures/100029500000275A00000F387839B165.emf" manifest:media-type="image/x-emf"/>
  <manifest:file-entry manifest:full-path="Pictures/100000010000017A000000E5D5010A6F.png" manifest:media-type="image/png"/>
  <manifest:file-entry manifest:full-path="Pictures/1000103400002711000017B8CDAB1C66.wmf" manifest:media-type="image/x-w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ystem" style:font-pitch="variable"/>
    <style:font-face style:name="Calibri" svg:font-family="Calibri" style:font-family-generic="system" style:font-pitch="variable"/>
    <style:font-face style:name="Disney Print" svg:font-family="'Disney Prin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Heading_20_8">
      <style:paragraph-properties fo:line-height="200%"/>
    </style:style>
    <style:style style:name="P2" style:family="paragraph" style:parent-style-name="Standard">
      <style:paragraph-properties fo:margin-left="3.747cm" fo:line-height="200%" fo:text-align="center" style:justify-single-word="false" fo:text-indent="-3.747cm" style:auto-text-indent="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justify" style:justify-single-word="false"/>
    </style:style>
    <style:style style:name="P5" style:family="paragraph" style:parent-style-name="Standard">
      <style:paragraph-properties fo:margin-left="1.244cm" fo:line-height="200%" fo:text-align="justify" style:justify-single-word="false" fo:text-indent="-1.244cm" style:auto-text-indent="false"/>
    </style:style>
    <style:style style:name="P6" style:family="paragraph" style:parent-style-name="Text_20_body">
      <style:paragraph-properties fo:line-height="200%"/>
    </style:style>
    <style:style style:name="T1" style:family="text">
      <style:text-properties style:font-name="Times New Roman" fo:font-size="12pt" fo:language="es" fo:country="PE" style:font-name-asian="Calibri" style:font-size-asian="12pt" style:language-asian="en" style:country-asian="US" style:font-name-complex="Arial1" style:font-size-complex="12pt" style:font-weight-complex="bold"/>
    </style:style>
    <style:style style:name="T2" style:family="text">
      <style:text-properties style:font-name="Times New Roman" fo:font-size="12pt" fo:language="es" fo:country="PE" style:font-name-asian="Calibri" style:font-size-asian="12pt" style:language-asian="en" style:country-asian="US" style:font-size-complex="12pt" style:font-weight-complex="bold"/>
    </style:style>
    <style:style style:name="T3" style:family="text">
      <style:text-properties style:font-name="Times New Roman" fo:font-size="12pt" fo:language="es" fo:country="PE" style:font-name-asian="Calibri" style:font-size-asian="12pt" style:language-asian="en" style:country-asian="US" style:font-size-complex="12pt" style:font-weight-complex="normal"/>
    </style:style>
    <style:style style:name="T4" style:family="text">
      <style:text-properties style:font-name="Times New Roman" fo:font-size="12pt" fo:language="es" fo:country="PE" fo:font-weight="normal" style:font-name-asian="Calibri" style:font-size-asian="12pt" style:language-asian="en" style:country-asian="US" style:font-weight-asian="normal" style:font-name-complex="Arial1" style:font-size-complex="12pt"/>
    </style:style>
    <style:style style:name="T5" style:family="text">
      <style:text-properties style:font-name="Times New Roman" fo:font-size="12pt" fo:language="es" fo:country="PE" fo:font-weight="normal" style:font-name-asian="Calibri" style:font-size-asian="12pt" style:language-asian="en" style:country-asian="US" style:font-weight-asian="normal"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fo:language="en" fo:country="US" fo:font-weight="normal" style:font-name-asian="Calibri" style:font-size-asian="12pt" style:language-asian="en" style:country-asian="US" style:font-weight-asian="normal" style:font-name-complex="Arial1" style:font-size-complex="12pt"/>
    </style:style>
    <style:style style:name="T8" style:family="text">
      <style:text-properties fo:language="es" fo:country="MX" fo:font-weight="normal" style:font-weight-asian="normal" style:font-name-complex="Arial1" style:font-weight-complex="bold"/>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 loext:marker-style-name="T6"><text:span text:style-name="T1">CASO CORPORACIÓN EL SOL S.A.A.</text:span><text:span text:style-name="T1"/></text:p>
        <text:p text:style-name="P4" loext:marker-style-name="T6"><text:span text:style-name="T4">La administración de la Corporación El Sol SAA, está considerando expandir sus negocios a comienzos de este año para cumplir con las demandas de una población creciente en el área de atención. Para evaluar los planes alternativos de expansión, la administración desea estimar el costo de capital nominal de la empresa. A continuación, se dan los siguientes datos financieros relevantes para la empresa.</text:span><text:span text:style-name="T4"/></text:p>
        <text:h text:style-name="P1" text:outline-level="8" loext:marker-style-name="T6"><text:span text:style-name="T2">Balance General</text:span><text:span text:style-name="T2"/></text:h>
        <text:p text:style-name="P3" loext:marker-style-name="T6"><text:span text:style-name="T4">Al 31 de diciembre del 2019</text:span><text:span text:style-name="T4"/></text:p>
        <text:h text:style-name="P1" text:outline-level="8" loext:marker-style-name="T6"><text:span text:style-name="T5">(Expresado en miles de soles)</text:span><text:span text:style-name="T5"/></text:h>
        <text:h text:style-name="P1" text:outline-level="8" loext:marker-style-name="T6"><draw:frame draw:style-name="fr2" draw:name="Imagen 3" text:anchor-type="char" svg:x="2.498cm" svg:y="0.056cm" svg:width="10.668cm" svg:height="3.678cm" draw:z-index="0"><draw:image xlink:href="Pictures/1000103400002711000017B8CDAB1C66.wmf" xlink:type="simple" xlink:show="embed" xlink:actuate="onLoad" draw:mime-type="image/x-wmf"/><draw:image xlink:href="Pictures/100000010000017A000000E5D5010A6F.png" xlink:type="simple" xlink:show="embed" xlink:actuate="onLoad" draw:mime-type="image/png"/></draw:frame><text:span text:style-name="T2">Estado de Resultados</text:span><text:span text:style-name="T2"/></text:h>
        <text:p text:style-name="P3" loext:marker-style-name="T6"><text:span text:style-name="T4">Del 01 de enero de 2019 al 31 de diciembre del 2019</text:span><text:span text:style-name="T4"/></text:p>
        <text:p text:style-name="P3" loext:marker-style-name="T6"><text:span text:style-name="T4">(Expresado en miles de dólares)</text:span><text:span text:style-name="T4"/></text:p>
        <text:p text:style-name="P3" loext:marker-style-name="T6"><draw:frame draw:style-name="fr1" draw:name="Imagen 1" text:anchor-type="as-char" svg:width="10.578cm" svg:height="4.115cm" draw:z-index="0"><draw:image xlink:href="Pictures/100029500000275A00000F387839B165.emf" xlink:type="simple" xlink:show="embed" xlink:actuate="onLoad" draw:mime-type="image/x-emf"/><draw:image xlink:href="Pictures/100000010000017D00000093B083BDF5.png" xlink:type="simple" xlink:show="embed" xlink:actuate="onLoad" draw:mime-type="image/png"/></draw:frame></text:p>
        <text:p text:style-name="P6" loext:marker-style-name="T6"><text:span text:style-name="T3">La deuda a largo plazo está íntegramente conformada por bonos actualmente en circulación, emitidos a la par en diciembre del 2019 y con fecha de vencimiento en diciembre del 2025. Estos bonos, que pagan actualmente un cupón de 7%, tiene un valor nominal de US$ 1,000 y un precio de mercado de US$ 950. </text:span><text:span text:style-name="T3"/></text:p>
        <text:p text:style-name="P4" loext:marker-style-name="T6"><text:span text:style-name="T4">Actualmente, las acciones preferentes, con valor facial de $ 100, se venden a un precio de $ 62.50 por acción; mientras que las acciones comunes, con valor en libros de $5, se transan en $ 15. </text:span><text:span text:style-name="T4"/></text:p>
        <text:p text:style-name="P4" loext:marker-style-name="T6"><text:span text:style-name="T4"><text:s/></text:span><text:span text:style-name="T4"/></text:p>
        <text:p text:style-name="P4" loext:marker-style-name="T6"><text:span text:style-name="T4">De otro lado se sabe que el beta apalancado de las acciones comunes en mercado emergente es de 1.1, el rendimiento histórico de los bonos de tesoro a largo plazo es de 5%, la prima histórica por riesgo del mercado es de 6.5% y el riesgo país del Perú es 1.5% </text:span><text:span text:style-name="T4"/></text:p>
        <text:p text:style-name="P4" loext:marker-style-name="T6"><text:span text:style-name="T4"><text:s/></text:span><text:span text:style-name="T4"/></text:p>
        <text:p text:style-name="P4" loext:marker-style-name="T6"><text:span text:style-name="T4">a.) Halle el costo promedio ponderado de capital </text:span><text:span text:style-name="T4"/></text:p>
        <text:p text:style-name="P5" loext:marker-style-name="T6"><text:span text:style-name="T4">b.) ¿En qué casos sería adecuado utilizar este costo promedio ponderado de capital? </text:span><text:span text:style-name="T4"/></text:p>
        <text:p text:style-name="P5" loext:marker-style-name="T8"><text:span text:style-name="T4">c.) En el caso que el proyecto no cumpla con las condiciones mencionadas en su respuesta anterior, sugiera un procedimiento a seguir. </text:span></text:p>
        <text:p text:style-name="P4" loext:marker-style-name="T6"><text:span text:style-name="T1">SOLUCIÓN</text:span><text:span text:style-name="T1"/></text:p>
        <text:p text:style-name="P4" loext:marker-style-name="T6"><text:span text:style-name="T4">a.) Costo Promedio Ponderado de Capital </text:span><text:span text:style-name="T4"/></text:p>
        <text:p text:style-name="P4" loext:marker-style-name="T6"><text:span text:style-name="T4">Bonos </text:span><text:span text:style-name="T4"/></text:p>
        <text:p text:style-name="P4" loext:marker-style-name="T6"><text:span text:style-name="T4">Valor Contable : 2,000,000 n(2019-2025): 6</text:span><text:span text:style-name="T4"/></text:p>
        <text:p text:style-name="P4" loext:marker-style-name="T6"><text:span text:style-name="T4">Número de Bonos: 2,000 Cupón: 70</text:span><text:span text:style-name="T4"/></text:p>
        <text:p text:style-name="P4" loext:marker-style-name="T6"><text:span text:style-name="T4">Precio de mercado: 950 F = 1,000</text:span><text:span text:style-name="T4"/></text:p>
        <text:p text:style-name="P4" loext:marker-style-name="T6"><text:span text:style-name="T4">Valor de mercado: 1,900,000 Po = 950</text:span><text:span text:style-name="T4"/></text:p>
        <text:p text:style-name="P4" loext:marker-style-name="T6"><text:span text:style-name="T4">Para hallar el costo de la deuda KRd) se halla con la siguiente igualdad </text:span><text:span text:style-name="T4"/></text:p>
        <text:p text:style-name="P4" loext:marker-style-name="T6"><text:soft-page-break/><text:span text:style-name="T4"><text:s/></text:span><text:span text:style-name="T4"/></text:p>
        <text:p text:style-name="P4" loext:marker-style-name="T6"><text:span text:style-name="T4"><text:s/>Po = Cupon * (1 + i)n - 1 + Valor Facial </text:span><text:span text:style-name="T4"/></text:p>
        <text:p text:style-name="P4" loext:marker-style-name="T6"><text:span text:style-name="T4"><text:s/>i (1 + i)n (1 + i)n </text:span><text:span text:style-name="T4"/></text:p>
        <text:p text:style-name="P4" loext:marker-style-name="T6"><text:span text:style-name="T4"><text:s/></text:span><text:span text:style-name="T4"/></text:p>
        <text:p text:style-name="P4" loext:marker-style-name="T6"><text:span text:style-name="T4"><text:s/>950 = 70 * (1 + i)6 - 1 + 1,000 </text:span><text:span text:style-name="T4"/></text:p>
        <text:p text:style-name="P4" loext:marker-style-name="T6"><text:span text:style-name="T4"><text:s/>i (1 + i)6 (1 + i)6 </text:span><text:span text:style-name="T4"/></text:p>
        <text:p text:style-name="P4" loext:marker-style-name="T6"><text:span text:style-name="T4"><text:s/></text:span><text:span text:style-name="T4"/></text:p>
        <text:p text:style-name="P4" loext:marker-style-name="T6"><text:span text:style-name="T4"><text:s/>Kd = 8.09% Se encuentra por tanteo </text:span><text:span text:style-name="T4"/></text:p>
        <text:p text:style-name="P4" loext:marker-style-name="T6"><text:span text:style-name="T1">Acciones Preferentes </text:span><text:span text:style-name="T1"/></text:p>
        <text:p text:style-name="P4" loext:marker-style-name="T6"><text:span text:style-name="T4">Valor Contable : 1,000,000 </text:span><text:span text:style-name="T4"/></text:p>
        <text:p text:style-name="P4" loext:marker-style-name="T6"><text:span text:style-name="T4">Número de Bonos: 10,000 </text:span><text:span text:style-name="T4"/></text:p>
        <text:p text:style-name="P4" loext:marker-style-name="T6"><text:span text:style-name="T4">Precio de mercado: 62.5 </text:span><text:span text:style-name="T4"/></text:p>
        <text:p text:style-name="P4" loext:marker-style-name="T6"><text:span text:style-name="T4">Valor de mercado: 625,000 </text:span><text:span text:style-name="T4"/></text:p>
        <text:p text:style-name="P4" loext:marker-style-name="T6"><text:span text:style-name="T4">Dividendo: 5 </text:span><text:span text:style-name="T4"/></text:p>
        <text:p text:style-name="P4" loext:marker-style-name="T6"><text:span text:style-name="T4">Kp = Dividendo/precio = 8% </text:span><text:span text:style-name="T4"/></text:p>
        <text:p text:style-name="P4" loext:marker-style-name="T6"><text:span text:style-name="T4"><text:s/></text:span><text:span text:style-name="T4"/></text:p>
        <text:p text:style-name="P4" loext:marker-style-name="T6"><text:span text:style-name="T1">Acciones Comunes </text:span><text:span text:style-name="T1"/></text:p>
        <text:p text:style-name="P4" loext:marker-style-name="T6"><text:span text:style-name="T4">Valor Contable : 500,000 </text:span><text:span text:style-name="T4"/></text:p>
        <text:p text:style-name="P4" loext:marker-style-name="T6"><text:span text:style-name="T4">Número de Acciones: 100,000 </text:span><text:span text:style-name="T4"/></text:p>
        <text:p text:style-name="P4" loext:marker-style-name="T6"><text:span text:style-name="T4">Precio de mercado: 15 </text:span><text:span text:style-name="T4"/></text:p>
        <text:p text:style-name="P4" loext:marker-style-name="T6"><text:span text:style-name="T4">Valor de mercado: 1,500,000 </text:span><text:span text:style-name="T4"/></text:p>
        <text:p text:style-name="P4" loext:marker-style-name="T6"><text:span text:style-name="T4">Además se tiene la siguiente información </text:span><text:span text:style-name="T4"/></text:p>
        <text:p text:style-name="P4" loext:marker-style-name="T6"><text:span text:style-name="T4"><text:s/> = 1.1 </text:span><text:span text:style-name="T4"/></text:p>
        <text:p text:style-name="P4" loext:marker-style-name="T6"><text:span text:style-name="T4"><text:s/>Rf = 5% </text:span><text:span text:style-name="T4"/></text:p>
        <text:p text:style-name="P4" loext:marker-style-name="T6"><text:span text:style-name="T4"><text:s/>Rm - Rf = 6.50% </text:span><text:span text:style-name="T4"/></text:p>
        <text:p text:style-name="P4" loext:marker-style-name="T6"><text:span text:style-name="T4"><text:s/>Rp = 1.5% </text:span><text:span text:style-name="T4"/></text:p>
        <text:p text:style-name="P4" loext:marker-style-name="T6"><text:soft-page-break/><text:span text:style-name="T4">Se obtiene la rentabilidad del accionista (Ke) </text:span><text:span text:style-name="T4"/></text:p>
        <text:p text:style-name="P4" loext:marker-style-name="T6"><text:span text:style-name="T4"><text:s/></text:span><text:span text:style-name="T4"/></text:p>
        <text:p text:style-name="P4" loext:marker-style-name="T6"><text:span text:style-name="T7">Ke = Rf + </text:span><text:span text:style-name="T4">β</text:span><text:span text:style-name="T7"> * (Rm - Rf) + Rp + Rp = 13.65% </text:span></text:p>
        <text:p text:style-name="P4" loext:marker-style-name="T6"><text:span text:style-name="T7"><text:s/></text:span><text:span text:style-name="T7"/></text:p>
        <text:p text:style-name="P4" loext:marker-style-name="T6"><text:span text:style-name="T4">PATRIMONIO TOTAL = 4,025,000 </text:span><text:span text:style-name="T4"/></text:p>
        <text:p text:style-name="P4" loext:marker-style-name="T6"><text:span text:style-name="T4">t (Impuesto a la renta) = 30% </text:span><text:span text:style-name="T4"/></text:p>
        <text:p text:style-name="P4" loext:marker-style-name="T6"><text:span text:style-name="T4"><text:s/></text:span><text:span text:style-name="T4"/></text:p>
        <text:p text:style-name="P4" loext:marker-style-name="T6"><draw:frame draw:style-name="fr1" draw:name="Imagen 2" text:anchor-type="as-char" svg:width="14.982cm" svg:height="3.15cm" draw:z-index="0"><draw:image xlink:href="Pictures/100033340000398D00000C146100DCEB.emf" xlink:type="simple" xlink:show="embed" xlink:actuate="onLoad" draw:mime-type="image/x-emf"/><draw:image xlink:href="Pictures/100000010000022D0000007598C74C57.png" xlink:type="simple" xlink:show="embed" xlink:actuate="onLoad" draw:mime-type="image/png"/></draw:frame><text:span text:style-name="T4"><text:s/></text:span></text:p>
        <text:p text:style-name="P4" loext:marker-style-name="T6"><text:span text:style-name="T1">Uso del WACC </text:span><text:span text:style-name="T1"/></text:p>
        <text:p text:style-name="P4" loext:marker-style-name="T6"><text:span text:style-name="T1">b) El WACC se usa cuando se cumplen dos condiciones: </text:span><text:span text:style-name="T1"/></text:p>
        <text:p text:style-name="P4" loext:marker-style-name="T6"><text:span text:style-name="T4">1.- El riesgo de la empresa es igual al riesgo del proyecto </text:span><text:span text:style-name="T4"/></text:p>
        <text:p text:style-name="P4" loext:marker-style-name="T6"><text:span text:style-name="T4">2.- El grado de apalancamiento es el mismo tanto para la empresa como para el proyecto </text:span><text:span text:style-name="T4"/></text:p>
        <text:p text:style-name="P4" loext:marker-style-name="T6"><text:span text:style-name="T4"><text:s/></text:span><text:span text:style-name="T4"/></text:p>
        <text:p text:style-name="P4" loext:marker-style-name="T6"><text:span text:style-name="T1">c.) En caso no cumpla con las dos condiciones</text:span><text:span text:style-name="T4">: </text:span></text:p>
        <text:p text:style-name="P4" loext:marker-style-name="T6"><text:span text:style-name="T4">Si el proyecto no cumple con las dos condiciones mencionadas se pueden presentar dos casos:</text:span><text:span text:style-name="T4"/></text:p>
        <text:p text:style-name="P4" loext:marker-style-name="T6"><text:span text:style-name="T4"><text:s/></text:span><text:span text:style-name="T4"/></text:p>
        <text:p text:style-name="P4" loext:marker-style-name="T6"><text:span text:style-name="T4">1.- Riesgo de la empresa diferente al riesgo del proyecto con apalancamientos iguales. </text:span><text:span text:style-name="T4"/></text:p>
        <text:p text:style-name="P4" loext:marker-style-name="T6"><text:span text:style-name="T4"><text:s/></text:span><text:span text:style-name="T4"/></text:p>
        <text:p text:style-name="P4" loext:marker-style-name="T6"><text:span text:style-name="T4">Se busca la beta de una empresa referente (líder del sector o promedio sectorial) y con este beta se obtiene Ke( CAPM) y luego WACC </text:span><text:span text:style-name="T4"/></text:p>
        <text:p text:style-name="P4" loext:marker-style-name="T6"><text:span text:style-name="T4"><text:s/></text:span><text:span text:style-name="T4"/></text:p>
        <text:p text:style-name="P4" loext:marker-style-name="T6"><text:span text:style-name="T4">2.- Grado de apalancamiento diferente pero igual riesgo. </text:span><text:span text:style-name="T4"/></text:p>
        <text:p text:style-name="P4" loext:marker-style-name="T6"><text:span text:style-name="T4"><text:s/></text:span><text:span text:style-name="T4"/></text:p>
        <text:p text:style-name="P4" loext:marker-style-name="T6"><text:span text:style-name="T4">En este caso se desapalanca la beta con grado de endeudamiento = 0, se obtiene βu. Luego se reapalanca con el grado de deuda/patrimonio del proyecto y se obtiene la beta reapalancada ( βrl) que es la que se usa para hallar Re y conociendo Kd y t se obtiene WACC. </text:span><text:span text:style-name="T4"/></text:p>
        <text:p text:style-name="P4" loext:marker-style-name="T6"><text:span text:style-name="T4"><text:s/></text:span><text:span text:style-name="T4"/></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ystem" style:font-pitch="variable"/>
    <style:font-face style:name="Calibri" svg:font-family="Calibri" style:font-family-generic="system" style:font-pitch="variable"/>
    <style:font-face style:name="Disney Print" svg:font-family="'Disney Prin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Disney Print" fo:font-family="'Disney Print'" style:font-family-generic="roman" fo:font-size="36pt" fo:language="es" fo:country="ES" fo:font-weight="bold" style:letter-kerning="false" style:font-name-asian="Times New Roman1" style:font-family-asian="'Times New Roman'" style:font-family-generic-asian="system" style:font-pitch-asian="variable" style:font-size-asian="36pt" style:language-asian="es" style:country-asian="E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roman" fo:font-size="11pt" fo:language="es" fo:country="MX" fo:font-weight="normal" style:font-size-asian="11pt" style:font-weight-asian="normal" style:font-name-complex="Arial1" style:font-family-complex="Arial" style:font-family-generic-complex="system" style:font-pitch-complex="variable" style:font-weight-complex="bold"/>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fo:font-size="11pt" style:text-underline-style="solid" style:text-underline-width="auto" style:text-underline-color="font-color" style:font-size-asian="11pt" style:font-name-complex="Arial1" style:font-family-complex="Arial" style:font-family-generic-complex="system" style:font-pitch-complex="variable" style:font-size-complex="10pt"/>
    </style:style>
    <style:style style:name="Heading_20_5" style:display-name="Heading 5" style:family="paragraph" style:parent-style-name="Standard" style:next-style-name="Standard" style:default-outline-level="5" style:list-style-name="" style:class="text">
      <style:paragraph-properties fo:text-align="justify" style:justify-single-word="false" fo:keep-with-next="always"/>
      <style:text-properties style:font-name="Arial" fo:font-family="Arial" style:font-family-generic="roman" fo:font-size="11pt" style:text-underline-style="solid" style:text-underline-width="auto" style:text-underline-color="font-color" style:font-size-asian="11pt" style:font-name-complex="Arial1" style:font-family-complex="Ari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keep-with-next="always"/>
      <style:text-properties style:font-name="Arial" fo:font-family="Arial" style:font-family-generic="roman" fo:font-size="11pt" fo:language="es" fo:country="MX" style:font-size-asian="11pt" style:font-name-complex="Arial1" style:font-family-complex="Arial"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style:font-name="Arial" fo:font-family="Arial" style:font-family-generic="roman" fo:font-size="11pt" style:font-size-asian="11pt" style:font-name-complex="Arial1" style:font-family-complex="Arial" style:font-family-generic-complex="system" style:font-pitch-complex="variable"/>
    </style:style>
    <style:style style:name="Default_20_Paragraph_20_Font" style:display-name="Default Paragraph Font"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14" style:layout-grid-base-height="1.734cm" style:layout-grid-ruby-height="0cm" style:layout-grid-mode="none" style:layout-grid-ruby-below="false" style:layout-grid-print="false" style:layout-grid-display="false" style:layout-grid-base-width="1.2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6:49:00</meta:creation-date>
    <meta:initial-creator>***</meta:initial-creator>
    <dc:language>es-PE</dc:language>
    <dc:creator>Elmer Edison Achalma Mendoza</dc:creator>
    <dc:date>2023-12-31T17:41:12</dc:date>
    <meta:editing-cycles>3</meta:editing-cycles>
    <meta:editing-duration>P0D</meta:editing-duration>
    <meta:generator>LibreOffice/24.2.4.2$Linux_X86_64 LibreOffice_project/420$Build-2</meta:generator>
    <meta:document-statistic meta:table-count="0" meta:image-count="3" meta:object-count="0" meta:page-count="3" meta:paragraph-count="75" meta:word-count="635" meta:character-count="3472" meta:non-whitespace-character-count="2826"/>
    <meta:user-defined meta:name="AppVersion">15.0000</meta:user-defined>
    <meta:template xlink:type="simple" xlink:actuate="onRequest" xlink:title="Normal.dotm" xlink:href=""/>
  </office:meta>
</office:document-meta>
</file>