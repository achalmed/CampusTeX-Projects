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A0000020A57206BE6.png" manifest:media-type="image/png"/>
  <manifest:file-entry manifest:full-path="Pictures/10000001000006DA0000023AEE6270A5.png" manifest:media-type="image/png"/>
  <manifest:file-entry manifest:full-path="Pictures/100000010000044600000392B0635EFF.png" manifest:media-type="image/png"/>
  <manifest:file-entry manifest:full-path="Pictures/100000010000080E000001E484D095C1.png" manifest:media-type="image/png"/>
  <manifest:file-entry manifest:full-path="Pictures/10000001000007320000021E81D63E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Georgia" svg:font-family="Georgia" style:font-family-generic="roman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200%" fo:text-align="center" style:justify-single-word="false"/>
    </style:style>
    <style:style style:name="P2" style:family="paragraph" style:parent-style-name="Standard" style:master-page-name="Standard">
      <style:paragraph-properties fo:margin-top="0cm" fo:margin-bottom="0cm" style:contextual-spacing="false" fo:line-height="200%" fo:text-align="center" style:justify-single-word="false" style:page-number="1"/>
    </style:style>
    <style:style style:name="P3" style:family="paragraph" style:parent-style-name="Standard">
      <style:paragraph-properties fo:margin-top="0cm" fo:margin-bottom="0cm" style:contextual-spacing="false" fo:line-height="200%"/>
    </style:style>
    <style:style style:name="P4" style:family="paragraph" style:parent-style-name="Standard">
      <style:paragraph-properties fo:margin-top="0cm" fo:margin-bottom="0cm" style:contextual-spacing="false" fo:line-height="2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" loext:marker-style-name="T2"><text:span text:style-name="T1">ACTIVIDAD TALLER 01</text:span><text:span text:style-name="T1"/></text:p>
        <text:p text:style-name="P1" loext:marker-style-name="T2"><text:span text:style-name="T1">INVERSIONES Y VALORES DE RECUPERO</text:span><text:span text:style-name="T1"/></text:p>
        <text:p text:style-name="P3" loext:marker-style-name="T2"><text:span text:style-name="T1">Objetivo</text:span><text:span text:style-name="T1"/></text:p>
        <text:p text:style-name="P3" loext:marker-style-name="T2"><text:span text:style-name="T3">Esta actividad tiene por finalidad que los equipos colaborativos puedan identificar y cuantificar el presupuesto de ventas y presupuesto de inversión inicial y valor de recupero para el proyecto que vienen desarrollando.</text:span><text:span text:style-name="T3"/></text:p>
        <text:p text:style-name="P3" loext:marker-style-name="T2"><text:span text:style-name="T1">Indicaciones</text:span><text:span text:style-name="T1"/></text:p>
        <text:p text:style-name="P3" loext:marker-style-name="T2"><text:span text:style-name="T3">1.- Proyecto para el horizonte de evaluación del proyecto las ventas en unidades y en soles, considerando para ello el valor de ventas unitario del producto o servicio.</text:span><text:span text:style-name="T3"/></text:p>
        <text:p text:style-name="P3" loext:marker-style-name="T2"><draw:frame draw:style-name="fr1" draw:name="image4.png" text:anchor-type="as-char" svg:width="15.002cm" svg:height="4.42cm" draw:z-index="0"><draw:image xlink:href="Pictures/10000001000007320000021E81D63EC0.png" xlink:type="simple" xlink:show="embed" xlink:actuate="onLoad" draw:mime-type="image/png"/></draw:frame></text:p>
        <text:p text:style-name="P3" loext:marker-style-name="T2"><draw:frame draw:style-name="fr1" draw:name="image3.png" text:anchor-type="as-char" svg:width="15.002cm" svg:height="3.526cm" draw:z-index="0"><draw:image xlink:href="Pictures/100000010000080E000001E484D095C1.png" xlink:type="simple" xlink:show="embed" xlink:actuate="onLoad" draw:mime-type="image/png"/></draw:frame></text:p>
        <text:p text:style-name="P3" loext:marker-style-name="T2"><text:span text:style-name="T3">2.- Identifique y calcule la inversión en activos fijos y capital de trabajo para el primer mes de operación, considerando los valores unitarios sin IGV y luego determine cuales de ellos pueden ser financiado con aporte propio y cuales con un financiamiento externo (préstamo).</text:span><text:span text:style-name="T3"/></text:p>
        <text:p text:style-name="P3" loext:marker-style-name="T2"><draw:frame draw:style-name="fr1" draw:name="image5.png" text:anchor-type="as-char" svg:width="15.002cm" svg:height="12.517cm" draw:z-index="0"><draw:image xlink:href="Pictures/100000010000044600000392B0635EFF.png" xlink:type="simple" xlink:show="embed" xlink:actuate="onLoad" draw:mime-type="image/png"/></draw:frame></text:p>
        <text:p text:style-name="P3" loext:marker-style-name="T2"><text:span text:style-name="T3">3.- Calcule la tabla de depreciaciones de los activos fijos, estimando el valor de recupero con el método contable.</text:span><text:span text:style-name="T3"/></text:p>
        <text:p text:style-name="P3" loext:marker-style-name="T2"><draw:frame draw:style-name="fr1" draw:name="image2.png" text:anchor-type="as-char" svg:width="15.002cm" svg:height="4.875cm" draw:z-index="0"><draw:image xlink:href="Pictures/10000001000006DA0000023AEE6270A5.png" xlink:type="simple" xlink:show="embed" xlink:actuate="onLoad" draw:mime-type="image/png"/></draw:frame></text:p>
        <text:p text:style-name="P3" loext:marker-style-name="T2"><text:span text:style-name="T3">4.- Finalmente estime el capital de trabajo de forma mensual y acumulado para el primer año. Luego incluya el monto en el cuadro de presupuesto de inversiones.</text:span><text:span text:style-name="T3"/></text:p>
        <text:p text:style-name="P3" loext:marker-style-name="T2"><draw:frame draw:style-name="fr1" draw:name="image1.png" text:anchor-type="as-char" svg:width="15.002cm" svg:height="4.092cm" draw:z-index="0"><draw:image xlink:href="Pictures/100000010000077A0000020A57206BE6.png" xlink:type="simple" xlink:show="embed" xlink:actuate="onLoad" draw:mime-type="image/png"/></draw:frame></text:p>
        <text:p text:style-name="P3" loext:marker-style-name="T2"><text:span text:style-name="T1">Evaluación</text:span><text:span text:style-name="T1"/></text:p>
        <text:p text:style-name="P3" loext:marker-style-name="T2"><text:span text:style-name="T3">Esta actividad es evaluada como participación en clases</text:span><text:span text:style-name="T3"/></text:p>
        <text:p text:style-name="P3" loext:marker-style-name="T2"><text:span text:style-name="T1">NOTA:</text:span><text:span text:style-name="T3"> También les servirá para incluir en el ítem correspondiente del trabajo colaborativo.</text:span></text:p>
        <text:p text:style-name="P4" loext:marker-style-name="T3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Georgia" svg:font-family="Georgia" style:font-family-generic="roman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es" fo:country="PE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9T21:42:00</meta:creation-date>
    <dc:language>es-PE</dc:language>
    <dc:creator>Elmer Edison Achalma Mendoza</dc:creator>
    <dc:date>2023-12-31T17:37:48</dc:date>
    <meta:editing-cycles>4</meta:editing-cycles>
    <meta:editing-duration>PT2M</meta:editing-duration>
    <meta:generator>LibreOffice/24.2.4.2$Linux_X86_64 LibreOffice_project/420$Build-2</meta:generator>
    <meta:document-statistic meta:table-count="0" meta:image-count="5" meta:object-count="0" meta:page-count="1" meta:paragraph-count="17" meta:word-count="182" meta:character-count="1167" meta:non-whitespace-character-count="997"/>
    <meta:user-defined meta:name="AppVersion">15.0000</meta:user-defined>
    <meta:template xlink:type="simple" xlink:actuate="onRequest" xlink:title="Normal.dotm" xlink:href=""/>
  </office:meta>
</office:document-meta>
</file>