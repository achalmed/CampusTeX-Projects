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2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293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6.126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2.965cm"/>
    </style:style>
    <style:style style:name="co16" style:family="table-column">
      <style:table-column-properties fo:break-before="auto" style:column-width="2.18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a_29__20_Flujos">
      <style:table-properties table:display="true" style:writing-mode="lr-tb"/>
    </style:style>
    <style:style style:name="ta2" style:family="table" style:master-page-name="PageStyle_5f_b_29__20_Leasing">
      <style:table-properties table:display="true" style:writing-mode="lr-tb"/>
    </style:style>
    <style:style style:name="ta3" style:family="table" style:master-page-name="PageStyle_5f_c_29__20_Capacidad_20_de_20_pag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fo:border-left="1.76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ffcc99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cc99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2" style:family="table-cell" style:parent-style-name="Default">
      <style:table-cell-properties style:diagonal-bl-tr="none" style:diagonal-tl-br="none" fo:border="0.74pt solid #000000" style:rotation-align="none"/>
    </style:style>
    <style:style style:name="ce43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33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33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33">
      <style:table-cell-properties style:diagonal-bl-tr="none" style:diagonal-tl-br="none" fo:border="0.74pt solid #000000" style:rotation-align="none"/>
    </style:style>
    <style:style style:name="ce49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33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5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1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3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35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">
      <style:table-cell-properties style:rotation-align="none"/>
    </style:style>
    <style:style style:name="ce75" style:family="table-cell" style:parent-style-name="Default" style:data-style-name="N11">
      <style:table-cell-properties style:rotation-align="none"/>
    </style:style>
    <style:style style:name="ce76" style:family="table-cell" style:parent-style-name="Default" style:data-style-name="N10">
      <style:table-cell-properties style:rotation-align="none"/>
    </style:style>
    <style:style style:name="ce77" style:family="table-cell" style:parent-style-name="Excel_20_Built-in_20_Comma" style:data-style-name="N133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9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3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137">
      <style:table-cell-properties style:diagonal-bl-tr="none" style:diagonal-tl-br="none" fo:border="0.74pt solid #000000" style:rotation-align="none"/>
    </style:style>
    <style:style style:name="ce84" style:family="table-cell" style:parent-style-name="Default" style:data-style-name="N13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134">
      <style:table-cell-properties style:diagonal-bl-tr="none" style:diagonal-tl-br="none" fo:border="0.74pt solid #000000" style:rotation-align="none"/>
    </style:style>
    <style:style style:name="ce86" style:family="table-cell" style:parent-style-name="Default" style:data-style-name="N134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3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3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34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36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13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137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99" style:family="table-cell" style:parent-style-name="Default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13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01" style:family="table-cell" style:parent-style-name="Default" style:data-style-name="N1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133">
      <style:table-cell-properties style:diagonal-bl-tr="none" style:diagonal-tl-br="none" fo:border="none" style:rotation-align="none"/>
    </style:style>
    <style:style style:name="ce106" style:family="table-cell" style:parent-style-name="Default">
      <style:table-cell-properties style:diagonal-bl-tr="none" style:diagonal-tl-br="none" fo:border="none" style:rotation-align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08" style:family="table-cell" style:parent-style-name="Default" style:data-style-name="N133">
      <style:table-cell-properties style:diagonal-bl-tr="none" style:diagonal-tl-br="none" fo:background-color="transparent" fo:border="none" style:rotation-align="none"/>
    </style:style>
    <style:style style:name="ce109" style:family="table-cell" style:parent-style-name="Default" style:data-style-name="N134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136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 style:data-style-name="N13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 style:data-style-name="N137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36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35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13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3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1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19" style:family="table-cell" style:parent-style-name="Default" style:data-style-name="N137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2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21" style:family="table-cell" style:parent-style-name="Default" style:data-style-name="N13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23" style:family="table-cell" style:parent-style-name="Default" style:data-style-name="N134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35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136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14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136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 style:data-style-name="N13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order-bottom="1.76pt solid #000000" fo:background-color="#f2f2f2" style:diagonal-bl-tr="none" style:diagonal-tl-br="none" fo:border-left="1.76pt solid #000000" fo:border-right="none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3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3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3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4" style:family="table-cell" style:parent-style-name="Default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3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57" style:family="table-cell" style:parent-style-name="Default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3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) Fluj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1" table:default-cell-style-name="Default"/>
        <table:table-row table:style-name="ro1">
          <table:table-cell/>
          <table:table-cell table:style-name="ce1" office:value-type="string" calcext:value-type="string" table:number-columns-spanned="12" table:number-rows-spanned="1">
            <text:p>TALLER FLUJO DE CAJA 01</text:p>
          </table:table-cell>
          <table:covered-table-cell table:number-columns-repeated="11" table:style-name="ce37"/>
          <table:table-cell table:number-columns-repeated="16371"/>
        </table:table-row>
        <table:table-row table:style-name="ro2">
          <table:table-cell/>
          <table:table-cell table:style-name="ce2" office:value-type="string" calcext:value-type="string" table:number-columns-spanned="12" table:number-rows-spanned="1">
            <text:p>CREACION DE UNA NUEVA EMPRESA</text:p>
          </table:table-cell>
          <table:covered-table-cell table:number-columns-repeated="11" table:style-name="ce38"/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A. FLUJO DE CAJA ECONOMICO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Programa de Produccion</text:p>
          </table:table-cell>
          <table:table-cell table:number-columns-repeated="16382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RUBRO</text:p>
          </table:table-cell>
          <table:table-cell table:style-name="ce39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47"/>
          <table:covered-table-cell table:style-name="ce39"/>
          <table:table-cell table:number-columns-repeated="16371"/>
        </table:table-row>
        <table:table-row table:style-name="ro3">
          <table:table-cell/>
          <table:covered-table-cell table:style-name="ce5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D8]+1" office:value-type="float" office:value="2" calcext:value-type="float">
            <text:p>2</text:p>
          </table:table-cell>
          <table:table-cell table:style-name="ce40" table:formula="of:=[.E8]+1" office:value-type="float" office:value="3" calcext:value-type="float">
            <text:p>3</text:p>
          </table:table-cell>
          <table:table-cell table:style-name="ce40" table:formula="of:=[.F8]+1" office:value-type="float" office:value="4" calcext:value-type="float">
            <text:p>4</text:p>
          </table:table-cell>
          <table:table-cell table:style-name="ce40" table:formula="of:=[.G8]+1" office:value-type="float" office:value="5" calcext:value-type="float">
            <text:p>5</text:p>
          </table:table-cell>
          <table:table-cell table:style-name="ce40" table:formula="of:=[.H8]+1" office:value-type="float" office:value="6" calcext:value-type="float">
            <text:p>6</text:p>
          </table:table-cell>
          <table:table-cell table:style-name="ce40" table:formula="of:=[.I8]+1" office:value-type="float" office:value="7" calcext:value-type="float">
            <text:p>7</text:p>
          </table:table-cell>
          <table:table-cell table:style-name="ce40" table:formula="of:=[.J8]+1" office:value-type="float" office:value="8" calcext:value-type="float">
            <text:p>8</text:p>
          </table:table-cell>
          <table:table-cell table:style-name="ce40" table:formula="of:=[.K8]+1" office:value-type="float" office:value="9" calcext:value-type="float">
            <text:p>9</text:p>
          </table:table-cell>
          <table:table-cell table:style-name="ce116" table:formula="of:=[.L8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6" office:value-type="string" calcext:value-type="string">
            <text:p>Producción y venta en unidades</text:p>
          </table:table-cell>
          <table:table-cell table:style-name="ce41"/>
          <table:table-cell table:style-name="ce41" office:value-type="float" office:value="1000" calcext:value-type="float">
            <text:p>1000</text:p>
          </table:table-cell>
          <table:table-cell table:style-name="ce41" table:formula="of:=[.D9]*1.2" office:value-type="float" office:value="1200" calcext:value-type="float">
            <text:p>1200</text:p>
          </table:table-cell>
          <table:table-cell table:style-name="ce41" table:formula="of:=[.E9]*1.05" office:value-type="float" office:value="1260" calcext:value-type="float">
            <text:p>1260</text:p>
          </table:table-cell>
          <table:table-cell table:style-name="ce98" table:formula="of:=[.F9]*1.02" office:value-type="float" office:value="1285.2" calcext:value-type="float">
            <text:p>1285</text:p>
          </table:table-cell>
          <table:table-cell table:style-name="ce98" table:formula="of:=[.G9]*1.02" office:value-type="float" office:value="1310.904" calcext:value-type="float">
            <text:p>1311</text:p>
          </table:table-cell>
          <table:table-cell table:style-name="ce98" table:formula="of:=[.H9]*1.02" office:value-type="float" office:value="1337.12208" calcext:value-type="float">
            <text:p>1337</text:p>
          </table:table-cell>
          <table:table-cell table:style-name="ce98" table:formula="of:=[.I9]*1.02" office:value-type="float" office:value="1363.8645216" calcext:value-type="float">
            <text:p>1364</text:p>
          </table:table-cell>
          <table:table-cell table:style-name="ce98" table:formula="of:=[.J9]*1.02" office:value-type="float" office:value="1391.141812032" calcext:value-type="float">
            <text:p>1391</text:p>
          </table:table-cell>
          <table:table-cell table:style-name="ce98" table:formula="of:=[.K9]*1.02" office:value-type="float" office:value="1418.96464827264" calcext:value-type="float">
            <text:p>1419</text:p>
          </table:table-cell>
          <table:table-cell table:style-name="ce98" table:formula="of:=[.L9]*1.02" office:value-type="float" office:value="1447.34394123809" calcext:value-type="float">
            <text:p>1447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Precio de venta por unidad</text:p>
          </table:table-cell>
          <table:table-cell table:style-name="ce42"/>
          <table:table-cell table:number-columns-repeated="3" table:style-name="ce42" office:value-type="float" office:value="100" calcext:value-type="float">
            <text:p>100</text:p>
          </table:table-cell>
          <table:table-cell table:number-columns-repeated="7" table:style-name="ce42" office:value-type="float" office:value="110" calcext:value-type="float">
            <text:p>110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Ingreso por ventas</text:p>
          </table:table-cell>
          <table:table-cell table:style-name="ce43"/>
          <table:table-cell table:style-name="ce77" table:formula="of:=[.D9]*[.D10]" office:value-type="float" office:value="100000" calcext:value-type="float">
            <text:p><text:s/>100,000 </text:p>
          </table:table-cell>
          <table:table-cell table:style-name="ce77" table:formula="of:=[.E9]*[.E10]" office:value-type="float" office:value="120000" calcext:value-type="float">
            <text:p><text:s/>120,000 </text:p>
          </table:table-cell>
          <table:table-cell table:style-name="ce77" table:formula="of:=[.F9]*[.F10]" office:value-type="float" office:value="126000" calcext:value-type="float">
            <text:p><text:s/>126,000 </text:p>
          </table:table-cell>
          <table:table-cell table:style-name="ce77" table:formula="of:=[.G9]*[.G10]" office:value-type="float" office:value="141372" calcext:value-type="float">
            <text:p><text:s/>141,372 </text:p>
          </table:table-cell>
          <table:table-cell table:style-name="ce77" table:formula="of:=[.H9]*[.H10]" office:value-type="float" office:value="144199.44" calcext:value-type="float">
            <text:p><text:s/>144,199 </text:p>
          </table:table-cell>
          <table:table-cell table:style-name="ce77" table:formula="of:=[.I9]*[.I10]" office:value-type="float" office:value="147083.4288" calcext:value-type="float">
            <text:p><text:s/>147,083 </text:p>
          </table:table-cell>
          <table:table-cell table:style-name="ce77" table:formula="of:=[.J9]*[.J10]" office:value-type="float" office:value="150025.097376" calcext:value-type="float">
            <text:p><text:s/>150,025 </text:p>
          </table:table-cell>
          <table:table-cell table:style-name="ce77" table:formula="of:=[.K9]*[.K10]" office:value-type="float" office:value="153025.59932352" calcext:value-type="float">
            <text:p><text:s/>153,026 </text:p>
          </table:table-cell>
          <table:table-cell table:style-name="ce77" table:formula="of:=[.L9]*[.L10]" office:value-type="float" office:value="156086.11130999" calcext:value-type="float">
            <text:p><text:s/>156,086 </text:p>
          </table:table-cell>
          <table:table-cell table:style-name="ce77" table:formula="of:=[.M9]*[.M10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9"/>
          <table:table-cell table:number-columns-repeated="16382"/>
        </table:table-row>
        <table:table-row table:style-name="ro3">
          <table:table-cell/>
          <table:table-cell table:style-name="ce10" office:value-type="string" calcext:value-type="string">
            <text:p>Presupuesto de Inversion</text:p>
          </table:table-cell>
          <table:table-cell table:number-columns-repeated="16382"/>
        </table:table-row>
        <table:table-row table:style-name="ro3">
          <table:table-cell/>
          <table:table-cell table:style-name="ce11" office:value-type="string" calcext:value-type="string">
            <text:p>Activos</text:p>
          </table:table-cell>
          <table:table-cell table:style-name="ce11" office:value-type="string" calcext:value-type="string">
            <text:p>Año 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Adquisicon de terrenos</text:p>
          </table:table-cell>
          <table:table-cell table:style-name="ce44" office:value-type="float" office:value="80000" calcext:value-type="float">
            <text:p><text:s/>80,000 </text:p>
          </table:table-cell>
          <table:table-cell table:style-name="ce78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Construccion de edificios</text:p>
          </table:table-cell>
          <table:table-cell table:style-name="ce44" office:value-type="float" office:value="200000" calcext:value-type="float">
            <text:p><text:s/>200,000 </text:p>
          </table:table-cell>
          <table:table-cell table:style-name="ce78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Maquinaria</text:p>
          </table:table-cell>
          <table:table-cell table:style-name="ce44" office:value-type="float" office:value="100000" calcext:value-type="float">
            <text:p><text:s/>100,000 </text:p>
          </table:table-cell>
          <table:table-cell table:style-name="ce79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inversion Fija</text:p>
          </table:table-cell>
          <table:table-cell table:style-name="ce45" table:formula="of:=SUM([.C15:.C17])" office:value-type="float" office:value="380000" calcext:value-type="float">
            <text:p><text:s/>380,00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Capital de trabajo</text:p>
          </table:table-cell>
          <table:table-cell table:style-name="ce44" table:formula="of:=([.D35]+[.D36])/2" office:value-type="float" office:value="-25000" calcext:value-type="float">
            <text:p><text:s/>(25,000)</text:p>
          </table:table-cell>
          <table:table-cell table:style-name="ce80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Capital de Trabajo</text:p>
          </table:table-cell>
          <table:table-cell table:style-name="ce45" table:formula="of:=[.C19]" office:value-type="float" office:value="-25000" calcext:value-type="float">
            <text:p><text:s/>(25,000)</text:p>
          </table:table-cell>
          <table:table-cell table:style-name="ce81"/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>
            <text:p>Total inversion </text:p>
          </table:table-cell>
          <table:table-cell table:style-name="ce46" table:formula="of:=[.C18]+[.C20]" office:value-type="float" office:value="355000" calcext:value-type="float">
            <text:p><text:s/>355,000 </text:p>
          </table:table-cell>
          <table:table-cell table:style-name="ce81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Tabla de Depreciaciones nominal</text:p>
          </table:table-cell>
          <table:table-cell table:number-columns-repeated="16382"/>
        </table:table-row>
        <table:table-row table:style-name="ro3">
          <table:table-cell/>
          <table:table-cell table:style-name="ce15" office:value-type="string" calcext:value-type="string">
            <text:p>Activos</text:p>
          </table:table-cell>
          <table:table-cell table:style-name="ce47" office:value-type="string" calcext:value-type="string">
            <text:p>Vc</text:p>
          </table:table-cell>
          <table:table-cell table:style-name="ce82" office:value-type="string" calcext:value-type="string">
            <text:p>Vida util</text:p>
          </table:table-cell>
          <table:table-cell table:style-name="ce82" office:value-type="string" calcext:value-type="string">
            <text:p>Dep/año 1-6</text:p>
          </table:table-cell>
          <table:table-cell table:style-name="ce82" office:value-type="string" calcext:value-type="string">
            <text:p>Dep/año 7-10</text:p>
          </table:table-cell>
          <table:table-cell table:style-name="ce82" office:value-type="string" calcext:value-type="string">
            <text:p>Dep Acum</text:p>
          </table:table-cell>
          <table:table-cell table:style-name="ce99" office:value-type="string" calcext:value-type="string">
            <text:p>Valor Cont.</text:p>
          </table:table-cell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dificaciones</text:p>
          </table:table-cell>
          <table:table-cell table:style-name="ce48" table:formula="of:=[.C16]" office:value-type="float" office:value="200000" calcext:value-type="float">
            <text:p><text:s/>200,000 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formula="of:=[.C25]*(1/[.D25])" office:value-type="float" office:value="5000" calcext:value-type="float">
            <text:p>5000</text:p>
          </table:table-cell>
          <table:table-cell table:style-name="ce42" table:formula="of:=[.E25]" office:value-type="float" office:value="5000" calcext:value-type="float">
            <text:p>5000</text:p>
          </table:table-cell>
          <table:table-cell table:style-name="ce42" table:formula="of:=[.F25]*10" office:value-type="float" office:value="50000" calcext:value-type="float">
            <text:p>50000</text:p>
          </table:table-cell>
          <table:table-cell table:style-name="ce100" table:formula="of:=[.C25]-[.G25]" office:value-type="float" office:value="150000" calcext:value-type="float">
            <text:p><text:s/>150,000 </text:p>
          </table:table-cell>
          <table:table-cell table:style-name="ce104"/>
          <table:table-cell table:style-name="ce108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quipos </text:p>
          </table:table-cell>
          <table:table-cell table:style-name="ce48" table:formula="of:=[.C17]" office:value-type="float" office:value="100000" calcext:value-type="float">
            <text:p><text:s/>100,000 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formula="of:=[.C26]*(1/[.D26])" office:value-type="float" office:value="10000" calcext:value-type="float">
            <text:p>1000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F26]*5" office:value-type="float" office:value="0" calcext:value-type="float">
            <text:p>0</text:p>
          </table:table-cell>
          <table:table-cell table:style-name="ce100"/>
          <table:table-cell table:style-name="ce78" table:number-columns-repeated="2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quipos año 6</text:p>
          </table:table-cell>
          <table:table-cell table:style-name="ce49" office:value-type="float" office:value="100000" calcext:value-type="float">
            <text:p><text:s/>100,000 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C27]*(1/[.D27])" office:value-type="float" office:value="10000" calcext:value-type="float">
            <text:p>10000</text:p>
          </table:table-cell>
          <table:table-cell table:style-name="ce42" table:formula="of:=[.F27]*4" office:value-type="float" office:value="40000" calcext:value-type="float">
            <text:p>40000</text:p>
          </table:table-cell>
          <table:table-cell table:style-name="ce100" table:formula="of:=[.C27]-[.G27]" office:value-type="float" office:value="60000" calcext:value-type="float">
            <text:p><text:s/>60,000 </text:p>
          </table:table-cell>
          <table:table-cell table:style-name="ce104"/>
          <table:table-cell table:style-name="ce108"/>
          <table:table-cell table:number-columns-repeated="16374"/>
        </table:table-row>
        <table:table-row table:style-name="ro3">
          <table:table-cell/>
          <table:table-cell table:style-name="ce17" office:value-type="string" calcext:value-type="string">
            <text:p>TOTAL</text:p>
          </table:table-cell>
          <table:table-cell table:style-name="ce43" table:number-columns-repeated="2"/>
          <table:table-cell table:style-name="ce97" table:formula="of:=SUM([.E25:.E27])" office:value-type="float" office:value="15000" calcext:value-type="float">
            <text:p>15000</text:p>
          </table:table-cell>
          <table:table-cell table:style-name="ce97" table:formula="of:=SUM([.F25:.F27])" office:value-type="float" office:value="15000" calcext:value-type="float">
            <text:p>15000</text:p>
          </table:table-cell>
          <table:table-cell table:style-name="ce43" table:formula="of:=SUM([.G25:.G27])" office:value-type="float" office:value="90000" calcext:value-type="float">
            <text:p>90000</text:p>
          </table:table-cell>
          <table:table-cell table:style-name="ce101" table:formula="of:=SUM([.H25:.H27])" office:value-type="float" office:value="210000" calcext:value-type="float">
            <text:p>210000</text:p>
          </table:table-cell>
          <table:table-cell table:style-name="ce10" table:number-columns-repeated="2"/>
          <table:table-cell table:number-columns-repeated="1637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8" office:value-type="string" calcext:value-type="string" table:number-columns-spanned="7" table:number-rows-spanned="1">
            <text:p>ESTADO DE RESULTADOS</text:p>
          </table:table-cell>
          <table:covered-table-cell table:number-columns-repeated="6" table:style-name="ce50"/>
          <table:table-cell table:number-columns-repeated="16376"/>
        </table:table-row>
        <table:table-row table:style-name="ro3">
          <table:table-cell/>
          <table:table-cell table:style-name="ce19" office:value-type="string" calcext:value-type="string" table:number-columns-spanned="1" table:number-rows-spanned="2">
            <text:p>RUBRO</text:p>
          </table:table-cell>
          <table:table-cell table:style-name="ce39" office:value-type="string" calcext:value-type="string" table:number-columns-spanned="11" table:number-rows-spanned="1">
            <text:p>PERIODO</text:p>
          </table:table-cell>
          <table:covered-table-cell table:number-columns-repeated="9" table:style-name="ce47"/>
          <table:covered-table-cell table:style-name="ce39"/>
          <table:table-cell table:number-columns-repeated="16371"/>
        </table:table-row>
        <table:table-row table:style-name="ro3">
          <table:table-cell/>
          <table:covered-table-cell table:style-name="ce17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D33]+1" office:value-type="float" office:value="2" calcext:value-type="float">
            <text:p>2</text:p>
          </table:table-cell>
          <table:table-cell table:style-name="ce40" table:formula="of:=[.E33]+1" office:value-type="float" office:value="3" calcext:value-type="float">
            <text:p>3</text:p>
          </table:table-cell>
          <table:table-cell table:style-name="ce40" table:formula="of:=[.F33]+1" office:value-type="float" office:value="4" calcext:value-type="float">
            <text:p>4</text:p>
          </table:table-cell>
          <table:table-cell table:style-name="ce40" table:formula="of:=[.G33]+1" office:value-type="float" office:value="5" calcext:value-type="float">
            <text:p>5</text:p>
          </table:table-cell>
          <table:table-cell table:style-name="ce40" table:formula="of:=[.H33]+1" office:value-type="float" office:value="6" calcext:value-type="float">
            <text:p>6</text:p>
          </table:table-cell>
          <table:table-cell table:style-name="ce40" table:formula="of:=[.I33]+1" office:value-type="float" office:value="7" calcext:value-type="float">
            <text:p>7</text:p>
          </table:table-cell>
          <table:table-cell table:style-name="ce40" table:formula="of:=[.J33]+1" office:value-type="float" office:value="8" calcext:value-type="float">
            <text:p>8</text:p>
          </table:table-cell>
          <table:table-cell table:style-name="ce40" table:formula="of:=[.K33]+1" office:value-type="float" office:value="9" calcext:value-type="float">
            <text:p>9</text:p>
          </table:table-cell>
          <table:table-cell table:style-name="ce116" table:formula="of:=[.L33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20" office:value-type="string" calcext:value-type="string">
            <text:p>Ventas netas</text:p>
          </table:table-cell>
          <table:table-cell table:style-name="ce51"/>
          <table:table-cell table:style-name="ce51" table:formula="of:=[.D11]" office:value-type="float" office:value="100000" calcext:value-type="float">
            <text:p><text:s/>100,000 </text:p>
          </table:table-cell>
          <table:table-cell table:style-name="ce51" table:formula="of:=[.E11]" office:value-type="float" office:value="120000" calcext:value-type="float">
            <text:p><text:s/>120,000 </text:p>
          </table:table-cell>
          <table:table-cell table:style-name="ce51" table:formula="of:=[.F11]" office:value-type="float" office:value="126000" calcext:value-type="float">
            <text:p><text:s/>126,000 </text:p>
          </table:table-cell>
          <table:table-cell table:style-name="ce51" table:formula="of:=[.G11]" office:value-type="float" office:value="141372" calcext:value-type="float">
            <text:p><text:s/>141,372 </text:p>
          </table:table-cell>
          <table:table-cell table:style-name="ce51" table:formula="of:=[.H11]" office:value-type="float" office:value="144199.44" calcext:value-type="float">
            <text:p><text:s/>144,199 </text:p>
          </table:table-cell>
          <table:table-cell table:style-name="ce51" table:formula="of:=[.I11]" office:value-type="float" office:value="147083.4288" calcext:value-type="float">
            <text:p><text:s/>147,083 </text:p>
          </table:table-cell>
          <table:table-cell table:style-name="ce51" table:formula="of:=[.J11]" office:value-type="float" office:value="150025.097376" calcext:value-type="float">
            <text:p><text:s/>150,025 </text:p>
          </table:table-cell>
          <table:table-cell table:style-name="ce51" table:formula="of:=[.K11]" office:value-type="float" office:value="153025.59932352" calcext:value-type="float">
            <text:p><text:s/>153,026 </text:p>
          </table:table-cell>
          <table:table-cell table:style-name="ce51" table:formula="of:=[.L11]" office:value-type="float" office:value="156086.11130999" calcext:value-type="float">
            <text:p><text:s/>156,086 </text:p>
          </table:table-cell>
          <table:table-cell table:style-name="ce117" table:formula="of:=[.M11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variable</text:p>
          </table:table-cell>
          <table:table-cell table:style-name="ce42"/>
          <table:table-cell table:style-name="ce42" table:formula="of:=-[.D9]*30" office:value-type="float" office:value="-30000" calcext:value-type="float">
            <text:p>-30000</text:p>
          </table:table-cell>
          <table:table-cell table:style-name="ce42" table:formula="of:=-[.E9]*30" office:value-type="float" office:value="-36000" calcext:value-type="float">
            <text:p>-36000</text:p>
          </table:table-cell>
          <table:table-cell table:style-name="ce42" table:formula="of:=-[.F9]*30" office:value-type="float" office:value="-37800" calcext:value-type="float">
            <text:p>-37800</text:p>
          </table:table-cell>
          <table:table-cell table:style-name="ce42" table:formula="of:=-[.G9]*30" office:value-type="float" office:value="-38556" calcext:value-type="float">
            <text:p>-38556</text:p>
          </table:table-cell>
          <table:table-cell table:style-name="ce42" table:formula="of:=-[.H9]*30" office:value-type="float" office:value="-39327.12" calcext:value-type="float">
            <text:p>-39327.12</text:p>
          </table:table-cell>
          <table:table-cell table:style-name="ce42" table:formula="of:=-[.I9]*30" office:value-type="float" office:value="-40113.6624" calcext:value-type="float">
            <text:p>-40113.6624</text:p>
          </table:table-cell>
          <table:table-cell table:style-name="ce42" table:formula="of:=-[.J9]*30" office:value-type="float" office:value="-40915.935648" calcext:value-type="float">
            <text:p>-40915.935648</text:p>
          </table:table-cell>
          <table:table-cell table:style-name="ce42" table:formula="of:=-[.K9]*30" office:value-type="float" office:value="-41734.25436096" calcext:value-type="float">
            <text:p>-41734.25436096</text:p>
          </table:table-cell>
          <table:table-cell table:style-name="ce42" table:formula="of:=-[.L9]*30" office:value-type="float" office:value="-42568.9394481792" calcext:value-type="float">
            <text:p>-42568.9394481792</text:p>
          </table:table-cell>
          <table:table-cell table:style-name="ce118" table:formula="of:=-[.M9]*30" office:value-type="float" office:value="-43420.3182371428" calcext:value-type="float">
            <text:p>-43420.3182371428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fijo</text:p>
          </table:table-cell>
          <table:table-cell table:style-name="ce42"/>
          <table:table-cell table:number-columns-repeated="9" table:style-name="ce42" office:value-type="float" office:value="-20000" calcext:value-type="float">
            <text:p>-20000</text:p>
          </table:table-cell>
          <table:table-cell table:style-name="ce118" office:value-type="float" office:value="-20000" calcext:value-type="float">
            <text:p>-20000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Depreciaciones</text:p>
          </table:table-cell>
          <table:table-cell table:style-name="ce42"/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119" table:formula="of:=-[.$E$28]" office:value-type="float" office:value="-15000" calcext:value-type="float">
            <text:p><text:s/>-15,000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Utilidad por venta de Maquinarias</text:p>
          </table:table-cell>
          <table:table-cell table:style-name="ce42"/>
          <table:table-cell table:style-name="ce48"/>
          <table:table-cell table:style-name="ce42" table:number-columns-repeated="3"/>
          <table:table-cell table:style-name="ce48"/>
          <table:table-cell table:style-name="ce105" table:formula="of:=[.C17]*0.5-[.E26]*4" office:value-type="float" office:value="10000" calcext:value-type="float">
            <text:p><text:s/>10,000 </text:p>
          </table:table-cell>
          <table:table-cell table:style-name="ce106" table:number-columns-repeated="3"/>
          <table:table-cell table:style-name="ce120"/>
          <table:table-cell table:number-columns-repeated="16371"/>
        </table:table-row>
        <table:table-row table:style-name="ro3">
          <table:table-cell/>
          <table:table-cell table:style-name="ce21" office:value-type="string" calcext:value-type="string">
            <text:p>Utilidad Imponible</text:p>
          </table:table-cell>
          <table:table-cell table:style-name="ce52"/>
          <table:table-cell table:style-name="ce84" table:formula="of:=SUM([.D34:.D38])" office:value-type="float" office:value="35000" calcext:value-type="float">
            <text:p><text:s/>35,000 </text:p>
          </table:table-cell>
          <table:table-cell table:style-name="ce84" table:formula="of:=SUM([.E34:.E38])" office:value-type="float" office:value="49000" calcext:value-type="float">
            <text:p><text:s/>49,000 </text:p>
          </table:table-cell>
          <table:table-cell table:style-name="ce84" table:formula="of:=SUM([.F34:.F38])" office:value-type="float" office:value="53200" calcext:value-type="float">
            <text:p><text:s/>53,200 </text:p>
          </table:table-cell>
          <table:table-cell table:style-name="ce84" table:formula="of:=SUM([.G34:.G38])" office:value-type="float" office:value="67816" calcext:value-type="float">
            <text:p><text:s/>67,816 </text:p>
          </table:table-cell>
          <table:table-cell table:style-name="ce84" table:formula="of:=SUM([.H34:.H38])" office:value-type="float" office:value="69872.32" calcext:value-type="float">
            <text:p><text:s/>69,872 </text:p>
          </table:table-cell>
          <table:table-cell table:style-name="ce84" table:formula="of:=SUM([.I34:.I38])" office:value-type="float" office:value="81969.7664" calcext:value-type="float">
            <text:p><text:s/>81,970 </text:p>
          </table:table-cell>
          <table:table-cell table:style-name="ce84" table:formula="of:=SUM([.J34:.J38])" office:value-type="float" office:value="74109.161728" calcext:value-type="float">
            <text:p><text:s/>74,109 </text:p>
          </table:table-cell>
          <table:table-cell table:style-name="ce84" table:formula="of:=SUM([.K34:.K38])" office:value-type="float" office:value="76291.34496256" calcext:value-type="float">
            <text:p><text:s/>76,291 </text:p>
          </table:table-cell>
          <table:table-cell table:style-name="ce84" table:formula="of:=SUM([.L34:.L38])" office:value-type="float" office:value="78517.1718618112" calcext:value-type="float">
            <text:p><text:s/>78,517 </text:p>
          </table:table-cell>
          <table:table-cell table:style-name="ce121" table:formula="of:=SUM([.M34:.M38])" office:value-type="float" office:value="80787.5152990475" calcext:value-type="float">
            <text:p><text:s/>80,788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Impuestos</text:p>
          </table:table-cell>
          <table:table-cell table:style-name="ce42"/>
          <table:table-cell table:style-name="ce85" table:formula="of:=-[.D39]*0.17" office:value-type="float" office:value="-5950" calcext:value-type="float">
            <text:p><text:s/>-5,950.0 </text:p>
          </table:table-cell>
          <table:table-cell table:style-name="ce85" table:formula="of:=-[.E39]*0.17" office:value-type="float" office:value="-8330" calcext:value-type="float">
            <text:p><text:s/>-8,330.0 </text:p>
          </table:table-cell>
          <table:table-cell table:style-name="ce85" table:formula="of:=-[.F39]*0.17" office:value-type="float" office:value="-9044" calcext:value-type="float">
            <text:p><text:s/>-9,044.0 </text:p>
          </table:table-cell>
          <table:table-cell table:style-name="ce85" table:formula="of:=-[.G39]*0.17" office:value-type="float" office:value="-11528.72" calcext:value-type="float">
            <text:p><text:s/>-11,528.7 </text:p>
          </table:table-cell>
          <table:table-cell table:style-name="ce85" table:formula="of:=-[.H39]*0.17" office:value-type="float" office:value="-11878.2944" calcext:value-type="float">
            <text:p><text:s/>-11,878.3 </text:p>
          </table:table-cell>
          <table:table-cell table:style-name="ce85" table:formula="of:=-[.I39]*0.17" office:value-type="float" office:value="-13934.860288" calcext:value-type="float">
            <text:p><text:s/>-13,934.9 </text:p>
          </table:table-cell>
          <table:table-cell table:style-name="ce85" table:formula="of:=-[.J39]*0.17" office:value-type="float" office:value="-12598.55749376" calcext:value-type="float">
            <text:p><text:s/>-12,598.6 </text:p>
          </table:table-cell>
          <table:table-cell table:style-name="ce85" table:formula="of:=-[.K39]*0.17" office:value-type="float" office:value="-12969.5286436352" calcext:value-type="float">
            <text:p><text:s/>-12,969.5 </text:p>
          </table:table-cell>
          <table:table-cell table:style-name="ce85" table:formula="of:=-[.L39]*0.17" office:value-type="float" office:value="-13347.9192165079" calcext:value-type="float">
            <text:p><text:s/>-13,347.9 </text:p>
          </table:table-cell>
          <table:table-cell table:style-name="ce122" table:formula="of:=-[.M39]*0.17" office:value-type="float" office:value="-13733.8776008381" calcext:value-type="float">
            <text:p><text:s/>-13,733.9 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Utlidad Neta</text:p>
          </table:table-cell>
          <table:table-cell table:style-name="ce43"/>
          <table:table-cell table:style-name="ce86" table:formula="of:=[.D39]+[.D40]" office:value-type="float" office:value="29050" calcext:value-type="float">
            <text:p><text:s/>29,050.0 </text:p>
          </table:table-cell>
          <table:table-cell table:style-name="ce86" table:formula="of:=[.E39]+[.E40]" office:value-type="float" office:value="40670" calcext:value-type="float">
            <text:p><text:s/>40,670.0 </text:p>
          </table:table-cell>
          <table:table-cell table:style-name="ce86" table:formula="of:=[.F39]+[.F40]" office:value-type="float" office:value="44156" calcext:value-type="float">
            <text:p><text:s/>44,156.0 </text:p>
          </table:table-cell>
          <table:table-cell table:style-name="ce86" table:formula="of:=[.G39]+[.G40]" office:value-type="float" office:value="56287.28" calcext:value-type="float">
            <text:p><text:s/>56,287.3 </text:p>
          </table:table-cell>
          <table:table-cell table:style-name="ce86" table:formula="of:=[.H39]+[.H40]" office:value-type="float" office:value="57994.0256" calcext:value-type="float">
            <text:p><text:s/>57,994.0 </text:p>
          </table:table-cell>
          <table:table-cell table:style-name="ce86" table:formula="of:=[.I39]+[.I40]" office:value-type="float" office:value="68034.906112" calcext:value-type="float">
            <text:p><text:s/>68,034.9 </text:p>
          </table:table-cell>
          <table:table-cell table:style-name="ce86" table:formula="of:=[.J39]+[.J40]" office:value-type="float" office:value="61510.60423424" calcext:value-type="float">
            <text:p><text:s/>61,510.6 </text:p>
          </table:table-cell>
          <table:table-cell table:style-name="ce86" table:formula="of:=[.K39]+[.K40]" office:value-type="float" office:value="63321.8163189248" calcext:value-type="float">
            <text:p><text:s/>63,321.8 </text:p>
          </table:table-cell>
          <table:table-cell table:style-name="ce86" table:formula="of:=[.L39]+[.L40]" office:value-type="float" office:value="65169.2526453033" calcext:value-type="float">
            <text:p><text:s/>65,169.3 </text:p>
          </table:table-cell>
          <table:table-cell table:style-name="ce123" table:formula="of:=[.M39]+[.M40]" office:value-type="float" office:value="67053.6376982094" calcext:value-type="float">
            <text:p><text:s/>67,053.6 </text:p>
          </table:table-cell>
          <table:table-cell table:number-columns-repeated="16371"/>
        </table:table-row>
        <table:table-row table:style-name="ro3" table:number-rows-repeated="3">
          <table:table-cell/>
          <table:table-cell table:style-name="ce10" table:number-columns-repeated="2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B. FLUJO DE CAJA FINANCIERO</text:p>
          </table:table-cell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10" table:number-columns-repeated="2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AMORTIZACION DE LA DEUDA</text:p>
          </table:table-cell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10" table:number-columns-repeated="2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Monto del prestamo</text:p>
          </table:table-cell>
          <table:table-cell table:style-name="ce53" table:formula="of:=[.C18]*0.6" office:value-type="currency" office:currency="S/." office:value="228000" calcext:value-type="currency">
            <text:p><text:s/>S/. 228,000 </text:p>
          </table:table-cell>
          <table:table-cell table:style-name="ce88"/>
          <table:table-cell table:style-name="ce87" table:number-columns-repeated="4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TEA</text:p>
          </table:table-cell>
          <table:table-cell table:style-name="ce54" office:value-type="percentage" office:value="0.09" calcext:value-type="percentage">
            <text:p>9 %</text:p>
          </table:table-cell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n</text:p>
          </table:table-cell>
          <table:table-cell table:style-name="ce10" office:value-type="float" office:value="8" calcext:value-type="float">
            <text:p>8</text:p>
          </table:table-cell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PAGO</text:p>
          </table:table-cell>
          <table:table-cell table:style-name="ce55" table:formula="of:=-PMT([.C50];[.C51];[.C49])" office:value-type="float" office:value="41193.7581469492" calcext:value-type="float">
            <text:p>S/. 41,194</text:p>
          </table:table-cell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10"/>
          <table:table-cell table:style-name="ce55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ERIODO</text:p>
          </table:table-cell>
          <table:table-cell table:style-name="ce39" office:value-type="string" calcext:value-type="string" table:number-columns-spanned="9" table:number-rows-spanned="1">
            <text:p>PERIODO</text:p>
          </table:table-cell>
          <table:covered-table-cell table:number-columns-repeated="7" table:style-name="ce47"/>
          <table:covered-table-cell table:style-name="ce39"/>
          <table:table-cell table:number-columns-repeated="16373"/>
        </table:table-row>
        <table:table-row table:style-name="ro3">
          <table:table-cell/>
          <table:covered-table-cell table:style-name="ce5"/>
          <table:table-cell table:style-name="ce40" office:value-type="float" office:value="0" calcext:value-type="float">
            <text:p>0</text:p>
          </table:table-cell>
          <table:table-cell table:style-name="ce89" office:value-type="float" office:value="1" calcext:value-type="float">
            <text:p><text:s/>1.0 </text:p>
          </table:table-cell>
          <table:table-cell table:style-name="ce89" table:formula="of:=[.D55]+1" office:value-type="float" office:value="2" calcext:value-type="float">
            <text:p><text:s/>2.0 </text:p>
          </table:table-cell>
          <table:table-cell table:style-name="ce89" table:formula="of:=[.E55]+1" office:value-type="float" office:value="3" calcext:value-type="float">
            <text:p><text:s/>3.0 </text:p>
          </table:table-cell>
          <table:table-cell table:style-name="ce89" table:formula="of:=[.F55]+1" office:value-type="float" office:value="4" calcext:value-type="float">
            <text:p><text:s/>4.0 </text:p>
          </table:table-cell>
          <table:table-cell table:style-name="ce89" table:formula="of:=[.G55]+1" office:value-type="float" office:value="5" calcext:value-type="float">
            <text:p><text:s/>5.0 </text:p>
          </table:table-cell>
          <table:table-cell table:style-name="ce89" table:formula="of:=[.H55]+1" office:value-type="float" office:value="6" calcext:value-type="float">
            <text:p><text:s/>6.0 </text:p>
          </table:table-cell>
          <table:table-cell table:style-name="ce89" table:formula="of:=[.I55]+1" office:value-type="float" office:value="7" calcext:value-type="float">
            <text:p><text:s/>7.0 </text:p>
          </table:table-cell>
          <table:table-cell table:style-name="ce109" table:formula="of:=[.J55]+1" office:value-type="float" office:value="8" calcext:value-type="float">
            <text:p><text:s/>8.0 </text:p>
          </table:table-cell>
          <table:table-cell table:style-name="ce115" table:number-columns-repeated="3"/>
          <table:table-cell table:number-columns-repeated="16370"/>
        </table:table-row>
        <table:table-row table:style-name="ro3">
          <table:table-cell/>
          <table:table-cell table:style-name="ce22" office:value-type="string" calcext:value-type="string">
            <text:p>Deuda Inicial</text:p>
          </table:table-cell>
          <table:table-cell table:style-name="ce56" table:formula="of:=[.C49]" office:value-type="currency" office:currency="S/." office:value="228000" calcext:value-type="currency">
            <text:p><text:s/>S/. 228,000 </text:p>
          </table:table-cell>
          <table:table-cell table:style-name="ce90" table:formula="of:=[.C60]" office:value-type="float" office:value="228000" calcext:value-type="float">
            <text:p><text:s/>228,000 </text:p>
          </table:table-cell>
          <table:table-cell table:style-name="ce90" table:formula="of:=[.D60]" office:value-type="float" office:value="207326.241853051" calcext:value-type="float">
            <text:p><text:s/>207,326 </text:p>
          </table:table-cell>
          <table:table-cell table:style-name="ce90" table:formula="of:=[.E60]" office:value-type="float" office:value="184791.845472876" calcext:value-type="float">
            <text:p><text:s/>184,792 </text:p>
          </table:table-cell>
          <table:table-cell table:style-name="ce90" table:formula="of:=[.F60]" office:value-type="float" office:value="160229.353418486" calcext:value-type="float">
            <text:p><text:s/>160,229 </text:p>
          </table:table-cell>
          <table:table-cell table:style-name="ce90" table:formula="of:=[.G60]" office:value-type="float" office:value="133456.237079201" calcext:value-type="float">
            <text:p><text:s/>133,456 </text:p>
          </table:table-cell>
          <table:table-cell table:style-name="ce90" table:formula="of:=[.H60]" office:value-type="float" office:value="104273.540269379" calcext:value-type="float">
            <text:p><text:s/>104,274 </text:p>
          </table:table-cell>
          <table:table-cell table:style-name="ce90" table:formula="of:=[.I60]" office:value-type="float" office:value="72464.4007466744" calcext:value-type="float">
            <text:p><text:s/>72,464 </text:p>
          </table:table-cell>
          <table:table-cell table:style-name="ce110" table:formula="of:=[.J60]" office:value-type="float" office:value="37792.4386669259" calcext:value-type="float">
            <text:p><text:s/>37,792 </text:p>
          </table:table-cell>
          <table:table-cell table:number-columns-repeated="16373"/>
        </table:table-row>
        <table:table-row table:style-name="ro3">
          <table:table-cell/>
          <table:table-cell table:style-name="ce23" office:value-type="string" calcext:value-type="string">
            <text:p>Interes</text:p>
          </table:table-cell>
          <table:table-cell table:style-name="ce57" office:value-type="float" office:value="0" calcext:value-type="float">
            <text:p>0</text:p>
          </table:table-cell>
          <table:table-cell table:style-name="ce91" table:formula="of:=[.D56]*[.$C$50]" office:value-type="float" office:value="20520" calcext:value-type="float">
            <text:p><text:s/>20,520.0 </text:p>
          </table:table-cell>
          <table:table-cell table:style-name="ce91" table:formula="of:=[.E56]*[.$C$50]" office:value-type="float" office:value="18659.3617667746" calcext:value-type="float">
            <text:p><text:s/>18,659.4 </text:p>
          </table:table-cell>
          <table:table-cell table:style-name="ce91" table:formula="of:=[.F56]*[.$C$50]" office:value-type="float" office:value="16631.2660925589" calcext:value-type="float">
            <text:p><text:s/>16,631.3 </text:p>
          </table:table-cell>
          <table:table-cell table:style-name="ce91" table:formula="of:=[.G56]*[.$C$50]" office:value-type="float" office:value="14420.6418076637" calcext:value-type="float">
            <text:p><text:s/>14,420.6 </text:p>
          </table:table-cell>
          <table:table-cell table:style-name="ce91" table:formula="of:=[.H56]*[.$C$50]" office:value-type="float" office:value="12011.061337128" calcext:value-type="float">
            <text:p><text:s/>12,011.1 </text:p>
          </table:table-cell>
          <table:table-cell table:style-name="ce91" table:formula="of:=[.I56]*[.$C$50]" office:value-type="float" office:value="9384.61862424415" calcext:value-type="float">
            <text:p><text:s/>9,384.6 </text:p>
          </table:table-cell>
          <table:table-cell table:style-name="ce91" table:formula="of:=[.J56]*[.$C$50]" office:value-type="float" office:value="6521.79606720069" calcext:value-type="float">
            <text:p><text:s/>6,521.8 </text:p>
          </table:table-cell>
          <table:table-cell table:style-name="ce111" table:formula="of:=[.K56]*[.$C$50]" office:value-type="float" office:value="3401.31948002333" calcext:value-type="float">
            <text:p><text:s/>3,401.3 </text:p>
          </table:table-cell>
          <table:table-cell table:number-columns-repeated="16373"/>
        </table:table-row>
        <table:table-row table:style-name="ro3">
          <table:table-cell/>
          <table:table-cell table:style-name="ce23" office:value-type="string" calcext:value-type="string">
            <text:p>Amortizacion capital</text:p>
          </table:table-cell>
          <table:table-cell table:style-name="ce57" office:value-type="float" office:value="0" calcext:value-type="float">
            <text:p>0</text:p>
          </table:table-cell>
          <table:table-cell table:style-name="ce92" table:formula="of:=[.D59]-[.D57]" office:value-type="float" office:value="20673.7581469492" calcext:value-type="float">
            <text:p><text:s/>20,674 </text:p>
          </table:table-cell>
          <table:table-cell table:style-name="ce92" table:formula="of:=[.E59]-[.E57]" office:value-type="float" office:value="22534.3963801746" calcext:value-type="float">
            <text:p><text:s/>22,534 </text:p>
          </table:table-cell>
          <table:table-cell table:style-name="ce92" table:formula="of:=[.F59]-[.F57]" office:value-type="float" office:value="24562.4920543903" calcext:value-type="float">
            <text:p><text:s/>24,562 </text:p>
          </table:table-cell>
          <table:table-cell table:style-name="ce92" table:formula="of:=[.G59]-[.G57]" office:value-type="float" office:value="26773.1163392854" calcext:value-type="float">
            <text:p><text:s/>26,773 </text:p>
          </table:table-cell>
          <table:table-cell table:style-name="ce92" table:formula="of:=[.H59]-[.H57]" office:value-type="float" office:value="29182.6968098211" calcext:value-type="float">
            <text:p><text:s/>29,183 </text:p>
          </table:table-cell>
          <table:table-cell table:style-name="ce92" table:formula="of:=[.I59]-[.I57]" office:value-type="float" office:value="31809.139522705" calcext:value-type="float">
            <text:p><text:s/>31,809 </text:p>
          </table:table-cell>
          <table:table-cell table:style-name="ce92" table:formula="of:=[.J59]-[.J57]" office:value-type="float" office:value="34671.9620797485" calcext:value-type="float">
            <text:p><text:s/>34,672 </text:p>
          </table:table-cell>
          <table:table-cell table:style-name="ce112" table:formula="of:=[.K59]-[.K57]" office:value-type="float" office:value="37792.4386669258" calcext:value-type="float">
            <text:p><text:s/>37,792 </text:p>
          </table:table-cell>
          <table:table-cell table:number-columns-repeated="16373"/>
        </table:table-row>
        <table:table-row table:style-name="ro3">
          <table:table-cell/>
          <table:table-cell table:style-name="ce23" office:value-type="string" calcext:value-type="string">
            <text:p>Cuota</text:p>
          </table:table-cell>
          <table:table-cell table:style-name="ce57" office:value-type="float" office:value="0" calcext:value-type="float">
            <text:p>0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113" table:formula="of:=[.$C$52]" office:value-type="float" office:value="41193.7581469492" calcext:value-type="float">
            <text:p><text:s/>41,194 </text:p>
          </table:table-cell>
          <table:table-cell table:number-columns-repeated="16373"/>
        </table:table-row>
        <table:table-row table:style-name="ro3">
          <table:table-cell/>
          <table:table-cell table:style-name="ce24" office:value-type="string" calcext:value-type="string">
            <text:p>Deuda Final</text:p>
          </table:table-cell>
          <table:table-cell table:style-name="ce58" table:formula="of:=[.C56]-[.C58]" office:value-type="currency" office:currency="S/." office:value="228000" calcext:value-type="currency">
            <text:p><text:s/>S/. 228,000 </text:p>
          </table:table-cell>
          <table:table-cell table:style-name="ce58" table:formula="of:=[.D56]-[.D58]" office:value-type="currency" office:currency="S/." office:value="207326.241853051" calcext:value-type="currency">
            <text:p><text:s/>S/. 207,326 </text:p>
          </table:table-cell>
          <table:table-cell table:style-name="ce58" table:formula="of:=[.E56]-[.E58]" office:value-type="currency" office:currency="S/." office:value="184791.845472876" calcext:value-type="currency">
            <text:p><text:s/>S/. 184,792 </text:p>
          </table:table-cell>
          <table:table-cell table:style-name="ce58" table:formula="of:=[.F56]-[.F58]" office:value-type="currency" office:currency="S/." office:value="160229.353418486" calcext:value-type="currency">
            <text:p><text:s/>S/. 160,229 </text:p>
          </table:table-cell>
          <table:table-cell table:style-name="ce58" table:formula="of:=[.G56]-[.G58]" office:value-type="currency" office:currency="S/." office:value="133456.237079201" calcext:value-type="currency">
            <text:p><text:s/>S/. 133,456 </text:p>
          </table:table-cell>
          <table:table-cell table:style-name="ce58" table:formula="of:=[.H56]-[.H58]" office:value-type="currency" office:currency="S/." office:value="104273.540269379" calcext:value-type="currency">
            <text:p><text:s/>S/. 104,274 </text:p>
          </table:table-cell>
          <table:table-cell table:style-name="ce58" table:formula="of:=[.I56]-[.I58]" office:value-type="currency" office:currency="S/." office:value="72464.4007466744" calcext:value-type="currency">
            <text:p><text:s/>S/. 72,464 </text:p>
          </table:table-cell>
          <table:table-cell table:style-name="ce58" table:formula="of:=[.J56]-[.J58]" office:value-type="currency" office:currency="S/." office:value="37792.4386669259" calcext:value-type="currency">
            <text:p><text:s/>S/. 37,792 </text:p>
          </table:table-cell>
          <table:table-cell table:style-name="ce114" table:formula="of:=[.K56]-[.K58]" office:value-type="currency" office:currency="S/." office:value="0" calcext:value-type="currency">
            <text:p><text:s/>S/. - <text:s text:c="2"/></text:p>
          </table:table-cell>
          <table:table-cell table:number-columns-repeated="16373"/>
        </table:table-row>
        <table:table-row table:style-name="ro3">
          <table:table-cell/>
          <table:table-cell table:style-name="ce10" table:number-columns-repeated="2"/>
          <table:table-cell table:style-name="ce87" table:number-columns-repeated="5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25" office:value-type="string" calcext:value-type="string" table:number-columns-spanned="12" table:number-rows-spanned="1">
            <text:p>FLUJOS DE CAJA ECONOMICO Y FINANCIERO</text:p>
          </table:table-cell>
          <table:covered-table-cell table:number-columns-repeated="11" table:style-name="ce59"/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26" office:value-type="string" calcext:value-type="string" table:number-columns-spanned="1" table:number-rows-spanned="2">
            <text:p>RUBROS</text:p>
          </table:table-cell>
          <table:table-cell table:style-name="ce60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94"/>
          <table:covered-table-cell table:style-name="ce124"/>
          <table:table-cell table:number-columns-repeated="16371"/>
        </table:table-row>
        <table:table-row table:style-name="ro3">
          <table:table-cell/>
          <table:covered-table-cell table:style-name="ce27"/>
          <table:table-cell table:style-name="ce40" office:value-type="float" office:value="0" calcext:value-type="float">
            <text:p>0</text:p>
          </table:table-cell>
          <table:table-cell table:style-name="ce40" table:formula="of:=[.C66]+1" office:value-type="float" office:value="1" calcext:value-type="float">
            <text:p>1</text:p>
          </table:table-cell>
          <table:table-cell table:style-name="ce40" table:formula="of:=[.D66]+1" office:value-type="float" office:value="2" calcext:value-type="float">
            <text:p>2</text:p>
          </table:table-cell>
          <table:table-cell table:style-name="ce40" table:formula="of:=[.E66]+1" office:value-type="float" office:value="3" calcext:value-type="float">
            <text:p>3</text:p>
          </table:table-cell>
          <table:table-cell table:style-name="ce40" table:formula="of:=[.F66]+1" office:value-type="float" office:value="4" calcext:value-type="float">
            <text:p>4</text:p>
          </table:table-cell>
          <table:table-cell table:style-name="ce40" table:formula="of:=[.G66]+1" office:value-type="float" office:value="5" calcext:value-type="float">
            <text:p>5</text:p>
          </table:table-cell>
          <table:table-cell table:style-name="ce40" table:formula="of:=[.H66]+1" office:value-type="float" office:value="6" calcext:value-type="float">
            <text:p>6</text:p>
          </table:table-cell>
          <table:table-cell table:style-name="ce40" table:formula="of:=[.I66]+1" office:value-type="float" office:value="7" calcext:value-type="float">
            <text:p>7</text:p>
          </table:table-cell>
          <table:table-cell table:style-name="ce40" table:formula="of:=[.J66]+1" office:value-type="float" office:value="8" calcext:value-type="float">
            <text:p>8</text:p>
          </table:table-cell>
          <table:table-cell table:style-name="ce40" table:formula="of:=[.K66]+1" office:value-type="float" office:value="9" calcext:value-type="float">
            <text:p>9</text:p>
          </table:table-cell>
          <table:table-cell table:style-name="ce116" table:formula="of:=[.L66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28" office:value-type="string" calcext:value-type="string" table:number-columns-spanned="12" table:number-rows-spanned="1">
            <text:p>Inversiones y Liquidación</text:p>
          </table:table-cell>
          <table:covered-table-cell table:number-columns-repeated="10" table:style-name="ce61"/>
          <table:covered-table-cell table:style-name="ce125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Activo Fijo (-)</text:p>
          </table:table-cell>
          <table:table-cell table:style-name="ce62" table:formula="of:=-[.C18]" office:value-type="float" office:value="-380000" calcext:value-type="float">
            <text:p>-380,000</text:p>
          </table:table-cell>
          <table:table-cell table:style-name="ce62" table:number-columns-repeated="5"/>
          <table:table-cell table:style-name="ce48" table:formula="of:=-[.C17]" office:value-type="float" office:value="-100000" calcext:value-type="float">
            <text:p><text:s/>(100,000)</text:p>
          </table:table-cell>
          <table:table-cell table:style-name="ce42" table:number-columns-repeated="3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Capital de Trabajo (-)</text:p>
          </table:table-cell>
          <table:table-cell table:style-name="ce62" table:formula="of:=([.D35]+[.D36])/2" office:value-type="float" office:value="-25000" calcext:value-type="float">
            <text:p>-25,000</text:p>
          </table:table-cell>
          <table:table-cell table:style-name="ce62" table:formula="of:=([.E35]+[.E36])/2-[.C69]" office:value-type="float" office:value="-3000" calcext:value-type="float">
            <text:p>-3,000</text:p>
          </table:table-cell>
          <table:table-cell table:style-name="ce62" table:formula="of:=([.F35]+[.F36])/2-[.D69]-[.C69]" office:value-type="float" office:value="-900" calcext:value-type="float">
            <text:p>-900</text:p>
          </table:table-cell>
          <table:table-cell table:style-name="ce62" table:formula="of:=([.G35]+[.G36])/2-[.E69]-[.D69]-[.C69]" office:value-type="float" office:value="-378" calcext:value-type="float">
            <text:p>-378</text:p>
          </table:table-cell>
          <table:table-cell table:style-name="ce62" table:formula="of:=([.H35]+[.H36])/2-[.F69]-[.E69]-[.D69]-[.C69]" office:value-type="float" office:value="-385.560000000001" calcext:value-type="float">
            <text:p>-386</text:p>
          </table:table-cell>
          <table:table-cell table:style-name="ce62" table:formula="of:=([.I35]+[.I36])/2-[.G69]-[.F69]-[.E69]-[.D69]-[.C69]" office:value-type="float" office:value="-393.271199999999" calcext:value-type="float">
            <text:p>-393</text:p>
          </table:table-cell>
          <table:table-cell table:style-name="ce62" table:formula="of:=([.J35]+[.J36])/2-[.H69]-[.G69]-[.F69]-[.E69]-[.D69]-[.C69]" office:value-type="float" office:value="-401.136624000003" calcext:value-type="float">
            <text:p>-401</text:p>
          </table:table-cell>
          <table:table-cell table:style-name="ce62" table:formula="of:=([.K35]+[.K36])/2-[.I69]-[.H69]-[.G69]-[.F69]-[.E69]-[.D69]-[.C69]" office:value-type="float" office:value="-409.159356479999" calcext:value-type="float">
            <text:p>-409</text:p>
          </table:table-cell>
          <table:table-cell table:style-name="ce62" table:formula="of:=([.L35]+[.L36])/2-[.J69]-[.I69]-[.H69]-[.G69]-[.F69]-[.E69]-[.D69]-[.C69]" office:value-type="float" office:value="-417.342543609604" calcext:value-type="float">
            <text:p>-417</text:p>
          </table:table-cell>
          <table:table-cell table:style-name="ce62" table:formula="of:=([.M35]+[.M36])/2-[.K69]-[.J69]-[.I69]-[.H69]-[.G69]-[.F69]-[.E69]-[.D69]-[.C69]" office:value-type="float" office:value="-425.689394481789" calcext:value-type="float">
            <text:p>-426</text:p>
          </table:table-cell>
          <table:table-cell table:style-name="ce120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Ingresos por venta de maquinaria (+)</text:p>
          </table:table-cell>
          <table:table-cell table:style-name="ce62" table:number-columns-repeated="6"/>
          <table:table-cell table:style-name="ce85" table:formula="of:=[.C17]*0.5" office:value-type="float" office:value="50000" calcext:value-type="float">
            <text:p><text:s/>50,000.0 </text:p>
          </table:table-cell>
          <table:table-cell table:style-name="ce42" table:number-columns-repeated="3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recupero Capital Trabajo (+)</text:p>
          </table:table-cell>
          <table:table-cell table:style-name="ce62" table:number-columns-repeated="6"/>
          <table:table-cell table:style-name="ce42" table:number-columns-repeated="4"/>
          <table:table-cell table:style-name="ce126" table:formula="of:=-SUM([.C69:.L69])" office:value-type="float" office:value="31710.1591185714" calcext:value-type="float">
            <text:p>31,710</text:p>
          </table:table-cell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recupero de Terreno (+)</text:p>
          </table:table-cell>
          <table:table-cell table:style-name="ce62" table:number-columns-repeated="6"/>
          <table:table-cell table:style-name="ce42" table:number-columns-repeated="4"/>
          <table:table-cell table:style-name="ce100" table:formula="of:=[.C15]" office:value-type="float" office:value="80000" calcext:value-type="float">
            <text:p><text:s/>80,000 </text:p>
          </table:table-cell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<text:s/>recupero de Activo Fijo (+)</text:p>
          </table:table-cell>
          <table:table-cell table:style-name="ce62" table:number-columns-repeated="6"/>
          <table:table-cell table:style-name="ce42" table:number-columns-repeated="4"/>
          <table:table-cell table:style-name="ce127" table:formula="of:=[.H28]" office:value-type="float" office:value="210000" calcext:value-type="float">
            <text:p>210000</text:p>
          </table:table-cell>
          <table:table-cell table:number-columns-repeated="16371"/>
        </table:table-row>
        <table:table-row table:style-name="ro3">
          <table:table-cell/>
          <table:table-cell table:style-name="ce29" office:value-type="string" calcext:value-type="string">
            <text:p>Flujo de Inversion y Liquid.</text:p>
          </table:table-cell>
          <table:table-cell table:style-name="ce63" table:formula="of:=SUM([.C68:.C73])" office:value-type="float" office:value="-405000" calcext:value-type="float">
            <text:p>-405,000</text:p>
          </table:table-cell>
          <table:table-cell table:style-name="ce63" table:formula="of:=SUM([.D68:.D73])" office:value-type="float" office:value="-3000" calcext:value-type="float">
            <text:p>-3,000</text:p>
          </table:table-cell>
          <table:table-cell table:style-name="ce63" table:formula="of:=SUM([.E68:.E73])" office:value-type="float" office:value="-900" calcext:value-type="float">
            <text:p>-900</text:p>
          </table:table-cell>
          <table:table-cell table:style-name="ce63" table:formula="of:=SUM([.F68:.F73])" office:value-type="float" office:value="-378" calcext:value-type="float">
            <text:p>-378</text:p>
          </table:table-cell>
          <table:table-cell table:style-name="ce63" table:formula="of:=SUM([.G68:.G73])" office:value-type="float" office:value="-385.560000000001" calcext:value-type="float">
            <text:p>-386</text:p>
          </table:table-cell>
          <table:table-cell table:style-name="ce63" table:formula="of:=SUM([.H68:.H73])" office:value-type="float" office:value="-393.271199999999" calcext:value-type="float">
            <text:p>-393</text:p>
          </table:table-cell>
          <table:table-cell table:style-name="ce63" table:formula="of:=SUM([.I68:.I73])" office:value-type="float" office:value="-50401.136624" calcext:value-type="float">
            <text:p>-50,401</text:p>
          </table:table-cell>
          <table:table-cell table:style-name="ce63" table:formula="of:=SUM([.J68:.J73])" office:value-type="float" office:value="-409.159356479999" calcext:value-type="float">
            <text:p>-409</text:p>
          </table:table-cell>
          <table:table-cell table:style-name="ce63" table:formula="of:=SUM([.K68:.K73])" office:value-type="float" office:value="-417.342543609604" calcext:value-type="float">
            <text:p>-417</text:p>
          </table:table-cell>
          <table:table-cell table:style-name="ce63" table:formula="of:=SUM([.L68:.L73])" office:value-type="float" office:value="-425.689394481789" calcext:value-type="float">
            <text:p>-426</text:p>
          </table:table-cell>
          <table:table-cell table:style-name="ce128" table:formula="of:=SUM([.M68:.M73])" office:value-type="float" office:value="321710.159118571" calcext:value-type="float">
            <text:p>321,710</text:p>
          </table:table-cell>
          <table:table-cell table:number-columns-repeated="16371"/>
        </table:table-row>
        <table:table-row table:style-name="ro3">
          <table:table-cell/>
          <table:table-cell table:style-name="ce30" office:value-type="string" calcext:value-type="string" table:number-columns-spanned="7" table:number-rows-spanned="1">
            <text:p>Costos y Gastos Operativos</text:p>
          </table:table-cell>
          <table:covered-table-cell table:number-columns-repeated="5" table:style-name="ce64"/>
          <table:covered-table-cell table:style-name="ce102"/>
          <table:table-cell table:style-name="ce106" table:number-columns-repeated="4"/>
          <table:table-cell table:style-name="ce120"/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Ingresos en efectivo (+)</text:p>
          </table:table-cell>
          <table:table-cell table:style-name="ce65" table:formula="of:=[.C11]" office:value-type="float" office:value="0" calcext:value-type="float">
            <text:p>0</text:p>
          </table:table-cell>
          <table:table-cell table:style-name="ce65" table:formula="of:=[.D11]" office:value-type="float" office:value="100000" calcext:value-type="float">
            <text:p>100,000</text:p>
          </table:table-cell>
          <table:table-cell table:style-name="ce65" table:formula="of:=[.E11]" office:value-type="float" office:value="120000" calcext:value-type="float">
            <text:p>120,000</text:p>
          </table:table-cell>
          <table:table-cell table:style-name="ce65" table:formula="of:=[.F11]" office:value-type="float" office:value="126000" calcext:value-type="float">
            <text:p>126,000</text:p>
          </table:table-cell>
          <table:table-cell table:style-name="ce65" table:formula="of:=[.G11]" office:value-type="float" office:value="141372" calcext:value-type="float">
            <text:p>141,372</text:p>
          </table:table-cell>
          <table:table-cell table:style-name="ce65" table:formula="of:=[.H11]" office:value-type="float" office:value="144199.44" calcext:value-type="float">
            <text:p>144,199</text:p>
          </table:table-cell>
          <table:table-cell table:style-name="ce65" table:formula="of:=[.I11]" office:value-type="float" office:value="147083.4288" calcext:value-type="float">
            <text:p>147,083</text:p>
          </table:table-cell>
          <table:table-cell table:style-name="ce65" table:formula="of:=[.J11]" office:value-type="float" office:value="150025.097376" calcext:value-type="float">
            <text:p>150,025</text:p>
          </table:table-cell>
          <table:table-cell table:style-name="ce65" table:formula="of:=[.K11]" office:value-type="float" office:value="153025.59932352" calcext:value-type="float">
            <text:p>153,026</text:p>
          </table:table-cell>
          <table:table-cell table:style-name="ce65" table:formula="of:=[.L11]" office:value-type="float" office:value="156086.11130999" calcext:value-type="float">
            <text:p>156,086</text:p>
          </table:table-cell>
          <table:table-cell table:style-name="ce129" table:formula="of:=[.M11]" office:value-type="float" office:value="159207.83353619" calcext:value-type="float">
            <text:p>159,208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Costos Fijos</text:p>
          </table:table-cell>
          <table:table-cell table:style-name="ce66"/>
          <table:table-cell table:style-name="ce62" table:formula="of:=[.D36]" office:value-type="float" office:value="-20000" calcext:value-type="float">
            <text:p>-20,000</text:p>
          </table:table-cell>
          <table:table-cell table:style-name="ce62" table:formula="of:=[.E36]" office:value-type="float" office:value="-20000" calcext:value-type="float">
            <text:p>-20,000</text:p>
          </table:table-cell>
          <table:table-cell table:style-name="ce62" table:formula="of:=[.F36]" office:value-type="float" office:value="-20000" calcext:value-type="float">
            <text:p>-20,000</text:p>
          </table:table-cell>
          <table:table-cell table:style-name="ce62" table:formula="of:=[.G36]" office:value-type="float" office:value="-20000" calcext:value-type="float">
            <text:p>-20,000</text:p>
          </table:table-cell>
          <table:table-cell table:style-name="ce62" table:formula="of:=[.H36]" office:value-type="float" office:value="-20000" calcext:value-type="float">
            <text:p>-20,000</text:p>
          </table:table-cell>
          <table:table-cell table:style-name="ce62" table:formula="of:=[.I36]" office:value-type="float" office:value="-20000" calcext:value-type="float">
            <text:p>-20,000</text:p>
          </table:table-cell>
          <table:table-cell table:style-name="ce62" table:formula="of:=[.J36]" office:value-type="float" office:value="-20000" calcext:value-type="float">
            <text:p>-20,000</text:p>
          </table:table-cell>
          <table:table-cell table:style-name="ce62" table:formula="of:=[.K36]" office:value-type="float" office:value="-20000" calcext:value-type="float">
            <text:p>-20,000</text:p>
          </table:table-cell>
          <table:table-cell table:style-name="ce62" table:formula="of:=[.L36]" office:value-type="float" office:value="-20000" calcext:value-type="float">
            <text:p>-20,000</text:p>
          </table:table-cell>
          <table:table-cell table:style-name="ce130" table:formula="of:=[.M36]" office:value-type="float" office:value="-20000" calcext:value-type="float">
            <text:p>-20,000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Costos Variables</text:p>
          </table:table-cell>
          <table:table-cell table:style-name="ce66"/>
          <table:table-cell table:style-name="ce62" table:formula="of:=[.D35]" office:value-type="float" office:value="-30000" calcext:value-type="float">
            <text:p>-30,000</text:p>
          </table:table-cell>
          <table:table-cell table:style-name="ce62" table:formula="of:=[.E35]" office:value-type="float" office:value="-36000" calcext:value-type="float">
            <text:p>-36,000</text:p>
          </table:table-cell>
          <table:table-cell table:style-name="ce62" table:formula="of:=[.F35]" office:value-type="float" office:value="-37800" calcext:value-type="float">
            <text:p>-37,800</text:p>
          </table:table-cell>
          <table:table-cell table:style-name="ce62" table:formula="of:=[.G35]" office:value-type="float" office:value="-38556" calcext:value-type="float">
            <text:p>-38,556</text:p>
          </table:table-cell>
          <table:table-cell table:style-name="ce62" table:formula="of:=[.H35]" office:value-type="float" office:value="-39327.12" calcext:value-type="float">
            <text:p>-39,327</text:p>
          </table:table-cell>
          <table:table-cell table:style-name="ce62" table:formula="of:=[.I35]" office:value-type="float" office:value="-40113.6624" calcext:value-type="float">
            <text:p>-40,114</text:p>
          </table:table-cell>
          <table:table-cell table:style-name="ce62" table:formula="of:=[.J35]" office:value-type="float" office:value="-40915.935648" calcext:value-type="float">
            <text:p>-40,916</text:p>
          </table:table-cell>
          <table:table-cell table:style-name="ce62" table:formula="of:=[.K35]" office:value-type="float" office:value="-41734.25436096" calcext:value-type="float">
            <text:p>-41,734</text:p>
          </table:table-cell>
          <table:table-cell table:style-name="ce62" table:formula="of:=[.L35]" office:value-type="float" office:value="-42568.9394481792" calcext:value-type="float">
            <text:p>-42,569</text:p>
          </table:table-cell>
          <table:table-cell table:style-name="ce130" table:formula="of:=[.M35]" office:value-type="float" office:value="-43420.3182371428" calcext:value-type="float">
            <text:p>-43,420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Impuestos y Tributos (-)</text:p>
          </table:table-cell>
          <table:table-cell table:style-name="ce67"/>
          <table:table-cell table:style-name="ce95" table:formula="of:=[.D40]" office:value-type="float" office:value="-5950" calcext:value-type="float">
            <text:p>-5,950</text:p>
          </table:table-cell>
          <table:table-cell table:style-name="ce95" table:formula="of:=[.E40]" office:value-type="float" office:value="-8330" calcext:value-type="float">
            <text:p>-8,330</text:p>
          </table:table-cell>
          <table:table-cell table:style-name="ce95" table:formula="of:=[.F40]" office:value-type="float" office:value="-9044" calcext:value-type="float">
            <text:p>-9,044</text:p>
          </table:table-cell>
          <table:table-cell table:style-name="ce95" table:formula="of:=[.G40]" office:value-type="float" office:value="-11528.72" calcext:value-type="float">
            <text:p>-11,529</text:p>
          </table:table-cell>
          <table:table-cell table:style-name="ce95" table:formula="of:=[.H40]" office:value-type="float" office:value="-11878.2944" calcext:value-type="float">
            <text:p>-11,878</text:p>
          </table:table-cell>
          <table:table-cell table:style-name="ce95" table:formula="of:=[.I40]" office:value-type="float" office:value="-13934.860288" calcext:value-type="float">
            <text:p>-13,935</text:p>
          </table:table-cell>
          <table:table-cell table:style-name="ce95" table:formula="of:=[.J40]" office:value-type="float" office:value="-12598.55749376" calcext:value-type="float">
            <text:p>-12,599</text:p>
          </table:table-cell>
          <table:table-cell table:style-name="ce95" table:formula="of:=[.K40]" office:value-type="float" office:value="-12969.5286436352" calcext:value-type="float">
            <text:p>-12,970</text:p>
          </table:table-cell>
          <table:table-cell table:style-name="ce95" table:formula="of:=[.L40]" office:value-type="float" office:value="-13347.9192165079" calcext:value-type="float">
            <text:p>-13,348</text:p>
          </table:table-cell>
          <table:table-cell table:style-name="ce131" table:formula="of:=[.M40]" office:value-type="float" office:value="-13733.8776008381" calcext:value-type="float">
            <text:p>-13,734</text:p>
          </table:table-cell>
          <table:table-cell table:number-columns-repeated="16371"/>
        </table:table-row>
        <table:table-row table:style-name="ro3">
          <table:table-cell/>
          <table:table-cell table:style-name="ce32" office:value-type="string" calcext:value-type="string">
            <text:p>Flujo de Caja Operativo</text:p>
          </table:table-cell>
          <table:table-cell table:style-name="ce68"/>
          <table:table-cell table:style-name="ce68" table:formula="of:=SUM([.D76:.D79])" office:value-type="float" office:value="44050" calcext:value-type="float">
            <text:p>44,050</text:p>
          </table:table-cell>
          <table:table-cell table:style-name="ce68" table:formula="of:=SUM([.E76:.E79])" office:value-type="float" office:value="55670" calcext:value-type="float">
            <text:p>55,670</text:p>
          </table:table-cell>
          <table:table-cell table:style-name="ce68" table:formula="of:=SUM([.F76:.F79])" office:value-type="float" office:value="59156" calcext:value-type="float">
            <text:p>59,156</text:p>
          </table:table-cell>
          <table:table-cell table:style-name="ce68" table:formula="of:=SUM([.G76:.G79])" office:value-type="float" office:value="71287.28" calcext:value-type="float">
            <text:p>71,287</text:p>
          </table:table-cell>
          <table:table-cell table:style-name="ce68" table:formula="of:=SUM([.H76:.H79])" office:value-type="float" office:value="72994.0256" calcext:value-type="float">
            <text:p>72,994</text:p>
          </table:table-cell>
          <table:table-cell table:style-name="ce68" table:formula="of:=SUM([.I76:.I79])" office:value-type="float" office:value="73034.906112" calcext:value-type="float">
            <text:p>73,035</text:p>
          </table:table-cell>
          <table:table-cell table:style-name="ce68" table:formula="of:=SUM([.J76:.J79])" office:value-type="float" office:value="76510.60423424" calcext:value-type="float">
            <text:p>76,511</text:p>
          </table:table-cell>
          <table:table-cell table:style-name="ce68" table:formula="of:=SUM([.K76:.K79])" office:value-type="float" office:value="78321.8163189248" calcext:value-type="float">
            <text:p>78,322</text:p>
          </table:table-cell>
          <table:table-cell table:style-name="ce68" table:formula="of:=SUM([.L76:.L79])" office:value-type="float" office:value="80169.2526453033" calcext:value-type="float">
            <text:p>80,169</text:p>
          </table:table-cell>
          <table:table-cell table:style-name="ce132" table:formula="of:=SUM([.M76:.M79])" office:value-type="float" office:value="82053.6376982094" calcext:value-type="float">
            <text:p>82,054</text:p>
          </table:table-cell>
          <table:table-cell table:number-columns-repeated="16371"/>
        </table:table-row>
        <table:table-row table:style-name="ro3">
          <table:table-cell/>
          <table:table-cell table:style-name="ce33" office:value-type="string" calcext:value-type="string">
            <text:p>Flujo de Caja Económico (FCE)</text:p>
          </table:table-cell>
          <table:table-cell table:style-name="ce69" table:formula="of:=[.C74]+[.C80]" office:value-type="float" office:value="-405000" calcext:value-type="float">
            <text:p>-405,000</text:p>
          </table:table-cell>
          <table:table-cell table:style-name="ce69" table:formula="of:=[.D74]+[.D80]" office:value-type="float" office:value="41050" calcext:value-type="float">
            <text:p>41,050</text:p>
          </table:table-cell>
          <table:table-cell table:style-name="ce69" table:formula="of:=[.E74]+[.E80]" office:value-type="float" office:value="54770" calcext:value-type="float">
            <text:p>54,770</text:p>
          </table:table-cell>
          <table:table-cell table:style-name="ce69" table:formula="of:=[.F74]+[.F80]" office:value-type="float" office:value="58778" calcext:value-type="float">
            <text:p>58,778</text:p>
          </table:table-cell>
          <table:table-cell table:style-name="ce69" table:formula="of:=[.G74]+[.G80]" office:value-type="float" office:value="70901.72" calcext:value-type="float">
            <text:p>70,902</text:p>
          </table:table-cell>
          <table:table-cell table:style-name="ce69" table:formula="of:=[.H74]+[.H80]" office:value-type="float" office:value="72600.7544" calcext:value-type="float">
            <text:p>72,601</text:p>
          </table:table-cell>
          <table:table-cell table:style-name="ce69" table:formula="of:=[.I74]+[.I80]" office:value-type="float" office:value="22633.769488" calcext:value-type="float">
            <text:p>22,634</text:p>
          </table:table-cell>
          <table:table-cell table:style-name="ce69" table:formula="of:=[.J74]+[.J80]" office:value-type="float" office:value="76101.44487776" calcext:value-type="float">
            <text:p>76,101</text:p>
          </table:table-cell>
          <table:table-cell table:style-name="ce69" table:formula="of:=[.K74]+[.K80]" office:value-type="float" office:value="77904.4737753152" calcext:value-type="float">
            <text:p>77,904</text:p>
          </table:table-cell>
          <table:table-cell table:style-name="ce69" table:formula="of:=[.L74]+[.L80]" office:value-type="float" office:value="79743.5632508215" calcext:value-type="float">
            <text:p>79,744</text:p>
          </table:table-cell>
          <table:table-cell table:style-name="ce133" table:formula="of:=[.M74]+[.M80]" office:value-type="float" office:value="403763.796816781" calcext:value-type="float">
            <text:p>403,764</text:p>
          </table:table-cell>
          <table:table-cell table:number-columns-repeated="16371"/>
        </table:table-row>
        <table:table-row table:style-name="ro3">
          <table:table-cell/>
          <table:table-cell table:style-name="ce34" office:value-type="string" calcext:value-type="string" table:number-columns-spanned="7" table:number-rows-spanned="1">
            <text:p>Financiamiento Neto</text:p>
          </table:table-cell>
          <table:covered-table-cell table:number-columns-repeated="5" table:style-name="ce70"/>
          <table:covered-table-cell table:style-name="ce103"/>
          <table:table-cell table:style-name="ce107" table:number-columns-repeated="4"/>
          <table:table-cell table:style-name="ce134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+ Préstamos</text:p>
          </table:table-cell>
          <table:table-cell table:style-name="ce71" table:formula="of:=[.C56]" office:value-type="float" office:value="228000" calcext:value-type="float">
            <text:p>228,000.00</text:p>
          </table:table-cell>
          <table:table-cell table:style-name="ce71" table:number-columns-repeated="5"/>
          <table:table-cell table:style-name="ce42" table:number-columns-repeated="4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- Capital</text:p>
          </table:table-cell>
          <table:table-cell table:style-name="ce71"/>
          <table:table-cell table:style-name="ce71" table:formula="of:=-[.D58]" office:value-type="float" office:value="-20673.7581469492" calcext:value-type="float">
            <text:p>-20,673.76</text:p>
          </table:table-cell>
          <table:table-cell table:style-name="ce71" table:formula="of:=-[.E58]" office:value-type="float" office:value="-22534.3963801746" calcext:value-type="float">
            <text:p>-22,534.40</text:p>
          </table:table-cell>
          <table:table-cell table:style-name="ce71" table:formula="of:=-[.F58]" office:value-type="float" office:value="-24562.4920543903" calcext:value-type="float">
            <text:p>-24,562.49</text:p>
          </table:table-cell>
          <table:table-cell table:style-name="ce71" table:formula="of:=-[.G58]" office:value-type="float" office:value="-26773.1163392854" calcext:value-type="float">
            <text:p>-26,773.12</text:p>
          </table:table-cell>
          <table:table-cell table:style-name="ce71" table:formula="of:=-[.H58]" office:value-type="float" office:value="-29182.6968098211" calcext:value-type="float">
            <text:p>-29,182.70</text:p>
          </table:table-cell>
          <table:table-cell table:style-name="ce71" table:formula="of:=-[.I58]" office:value-type="float" office:value="-31809.139522705" calcext:value-type="float">
            <text:p>-31,809.14</text:p>
          </table:table-cell>
          <table:table-cell table:style-name="ce71" table:formula="of:=-[.J58]" office:value-type="float" office:value="-34671.9620797485" calcext:value-type="float">
            <text:p>-34,671.96</text:p>
          </table:table-cell>
          <table:table-cell table:style-name="ce71" table:formula="of:=-[.K58]" office:value-type="float" office:value="-37792.4386669258" calcext:value-type="float">
            <text:p>-37,792.44</text:p>
          </table:table-cell>
          <table:table-cell table:style-name="ce42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- Intereses</text:p>
          </table:table-cell>
          <table:table-cell table:style-name="ce71"/>
          <table:table-cell table:style-name="ce71" table:formula="of:=-[.D57]" office:value-type="float" office:value="-20520" calcext:value-type="float">
            <text:p>-20,520.00</text:p>
          </table:table-cell>
          <table:table-cell table:style-name="ce71" table:formula="of:=-[.E57]" office:value-type="float" office:value="-18659.3617667746" calcext:value-type="float">
            <text:p>-18,659.36</text:p>
          </table:table-cell>
          <table:table-cell table:style-name="ce71" table:formula="of:=-[.F57]" office:value-type="float" office:value="-16631.2660925589" calcext:value-type="float">
            <text:p>-16,631.27</text:p>
          </table:table-cell>
          <table:table-cell table:style-name="ce71" table:formula="of:=-[.G57]" office:value-type="float" office:value="-14420.6418076637" calcext:value-type="float">
            <text:p>-14,420.64</text:p>
          </table:table-cell>
          <table:table-cell table:style-name="ce71" table:formula="of:=-[.H57]" office:value-type="float" office:value="-12011.061337128" calcext:value-type="float">
            <text:p>-12,011.06</text:p>
          </table:table-cell>
          <table:table-cell table:style-name="ce71" table:formula="of:=-[.I57]" office:value-type="float" office:value="-9384.61862424415" calcext:value-type="float">
            <text:p>-9,384.62</text:p>
          </table:table-cell>
          <table:table-cell table:style-name="ce71" table:formula="of:=-[.J57]" office:value-type="float" office:value="-6521.79606720069" calcext:value-type="float">
            <text:p>-6,521.80</text:p>
          </table:table-cell>
          <table:table-cell table:style-name="ce71" table:formula="of:=-[.K57]" office:value-type="float" office:value="-3401.31948002333" calcext:value-type="float">
            <text:p>-3,401.32</text:p>
          </table:table-cell>
          <table:table-cell table:style-name="ce42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+ Escudo Fiscal o tributario</text:p>
          </table:table-cell>
          <table:table-cell table:style-name="ce72"/>
          <table:table-cell table:style-name="ce96" table:formula="of:=-[.D85]*0.17" office:value-type="float" office:value="3488.4" calcext:value-type="float">
            <text:p>3488.40</text:p>
          </table:table-cell>
          <table:table-cell table:style-name="ce96" table:formula="of:=-[.E85]*0.17" office:value-type="float" office:value="3172.09150035168" calcext:value-type="float">
            <text:p>3172.09</text:p>
          </table:table-cell>
          <table:table-cell table:style-name="ce96" table:formula="of:=-[.F85]*0.17" office:value-type="float" office:value="2827.31523573501" calcext:value-type="float">
            <text:p>2827.32</text:p>
          </table:table-cell>
          <table:table-cell table:style-name="ce96" table:formula="of:=-[.G85]*0.17" office:value-type="float" office:value="2451.50910730283" calcext:value-type="float">
            <text:p>2451.51</text:p>
          </table:table-cell>
          <table:table-cell table:style-name="ce96" table:formula="of:=-[.H85]*0.17" office:value-type="float" office:value="2041.88042731177" calcext:value-type="float">
            <text:p>2041.88</text:p>
          </table:table-cell>
          <table:table-cell table:style-name="ce96" table:formula="of:=-[.I85]*0.17" office:value-type="float" office:value="1595.3851661215" calcext:value-type="float">
            <text:p>1595.39</text:p>
          </table:table-cell>
          <table:table-cell table:style-name="ce96" table:formula="of:=-[.J85]*0.17" office:value-type="float" office:value="1108.70533142412" calcext:value-type="float">
            <text:p>1108.71</text:p>
          </table:table-cell>
          <table:table-cell table:style-name="ce96" table:formula="of:=-[.K85]*0.17" office:value-type="float" office:value="578.224311603966" calcext:value-type="float">
            <text:p>578.22</text:p>
          </table:table-cell>
          <table:table-cell table:style-name="ce42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23" office:value-type="string" calcext:value-type="string">
            <text:p>Flujo de Caja de Deuda (FCD)</text:p>
          </table:table-cell>
          <table:table-cell table:style-name="ce71" table:formula="of:=SUM([.C83:.C86])" office:value-type="float" office:value="228000" calcext:value-type="float">
            <text:p>228,000.00</text:p>
          </table:table-cell>
          <table:table-cell table:style-name="ce71" table:formula="of:=SUM([.D83:.D86])" office:value-type="float" office:value="-37705.3581469492" calcext:value-type="float">
            <text:p>-37,705.36</text:p>
          </table:table-cell>
          <table:table-cell table:style-name="ce71" table:formula="of:=SUM([.E83:.E86])" office:value-type="float" office:value="-38021.6666465975" calcext:value-type="float">
            <text:p>-38,021.67</text:p>
          </table:table-cell>
          <table:table-cell table:style-name="ce71" table:formula="of:=SUM([.F83:.F86])" office:value-type="float" office:value="-38366.4429112142" calcext:value-type="float">
            <text:p>-38,366.44</text:p>
          </table:table-cell>
          <table:table-cell table:style-name="ce71" table:formula="of:=SUM([.G83:.G86])" office:value-type="float" office:value="-38742.2490396463" calcext:value-type="float">
            <text:p>-38,742.25</text:p>
          </table:table-cell>
          <table:table-cell table:style-name="ce71" table:formula="of:=SUM([.H83:.H86])" office:value-type="float" office:value="-39151.8777196374" calcext:value-type="float">
            <text:p>-39,151.88</text:p>
          </table:table-cell>
          <table:table-cell table:style-name="ce71" table:formula="of:=SUM([.I83:.I86])" office:value-type="float" office:value="-39598.3729808277" calcext:value-type="float">
            <text:p>-39,598.37</text:p>
          </table:table-cell>
          <table:table-cell table:style-name="ce71" table:formula="of:=SUM([.J83:.J86])" office:value-type="float" office:value="-40085.052815525" calcext:value-type="float">
            <text:p>-40,085.05</text:p>
          </table:table-cell>
          <table:table-cell table:style-name="ce71" table:formula="of:=SUM([.K83:.K86])" office:value-type="float" office:value="-40615.5338353452" calcext:value-type="float">
            <text:p>-40,615.53</text:p>
          </table:table-cell>
          <table:table-cell table:style-name="ce42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35" office:value-type="string" calcext:value-type="string">
            <text:p>Flujo de Caja Financiero (FCF)</text:p>
          </table:table-cell>
          <table:table-cell table:style-name="ce73" table:formula="of:=[.C81]+[.C87]" office:value-type="float" office:value="-177000" calcext:value-type="float">
            <text:p>-177,000</text:p>
          </table:table-cell>
          <table:table-cell table:style-name="ce73" table:formula="of:=[.D81]+[.D87]" office:value-type="float" office:value="3344.64185305084" calcext:value-type="float">
            <text:p>3,345</text:p>
          </table:table-cell>
          <table:table-cell table:style-name="ce73" table:formula="of:=[.E81]+[.E87]" office:value-type="float" office:value="16748.3333534025" calcext:value-type="float">
            <text:p>16,748</text:p>
          </table:table-cell>
          <table:table-cell table:style-name="ce73" table:formula="of:=[.F81]+[.F87]" office:value-type="float" office:value="20411.5570887858" calcext:value-type="float">
            <text:p>20,412</text:p>
          </table:table-cell>
          <table:table-cell table:style-name="ce73" table:formula="of:=[.G81]+[.G87]" office:value-type="float" office:value="32159.4709603537" calcext:value-type="float">
            <text:p>32,159</text:p>
          </table:table-cell>
          <table:table-cell table:style-name="ce73" table:formula="of:=[.H81]+[.H87]" office:value-type="float" office:value="33448.8766803626" calcext:value-type="float">
            <text:p>33,449</text:p>
          </table:table-cell>
          <table:table-cell table:style-name="ce73" table:formula="of:=[.I81]+[.I87]" office:value-type="float" office:value="-16964.6034928277" calcext:value-type="float">
            <text:p>-16,965</text:p>
          </table:table-cell>
          <table:table-cell table:style-name="ce73" table:formula="of:=[.J81]+[.J87]" office:value-type="float" office:value="36016.392062235" calcext:value-type="float">
            <text:p>36,016</text:p>
          </table:table-cell>
          <table:table-cell table:style-name="ce73" table:formula="of:=[.K81]+[.K87]" office:value-type="float" office:value="37288.93993997" calcext:value-type="float">
            <text:p>37,289</text:p>
          </table:table-cell>
          <table:table-cell table:style-name="ce73" table:formula="of:=[.L81]+[.L87]" office:value-type="float" office:value="79743.5632508215" calcext:value-type="float">
            <text:p>79,744</text:p>
          </table:table-cell>
          <table:table-cell table:style-name="ce135" table:formula="of:=[.M81]+[.M87]" office:value-type="float" office:value="403763.796816781" calcext:value-type="float">
            <text:p>403,764</text:p>
          </table:table-cell>
          <table:table-cell table:number-columns-repeated="16371"/>
        </table:table-row>
        <table:table-row table:style-name="ro3">
          <table:table-cell/>
          <table:table-cell table:style-name="ce36" office:value-type="string" calcext:value-type="string">
            <text:p>(*) sin depreciaciones</text:p>
          </table:table-cell>
          <table:table-cell table:style-name="ce36" table:number-columns-repeated="6"/>
          <table:table-cell table:number-columns-repeated="16376"/>
        </table:table-row>
        <table:table-row table:style-name="ro3">
          <table:table-cell/>
          <table:table-cell table:style-name="ce36" office:value-type="string" calcext:value-type="string">
            <text:p>(**) sin amortizacion de intangibles</text:p>
          </table:table-cell>
          <table:table-cell table:style-name="ce36" table:number-columns-repeated="6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Flujo Ajustado</text:p>
          </table:table-cell>
          <table:table-cell table:style-name="ce74" table:formula="of:=[.C81]+[.C86]" office:value-type="float" office:value="-405000" calcext:value-type="float">
            <text:p>-405,000</text:p>
          </table:table-cell>
          <table:table-cell table:style-name="ce74" table:formula="of:=[.D81]+[.D86]" office:value-type="float" office:value="44538.4" calcext:value-type="float">
            <text:p>44,538</text:p>
          </table:table-cell>
          <table:table-cell table:style-name="ce74" table:formula="of:=[.E81]+[.E86]" office:value-type="float" office:value="57942.0915003517" calcext:value-type="float">
            <text:p>57,942</text:p>
          </table:table-cell>
          <table:table-cell table:style-name="ce74" table:formula="of:=[.F81]+[.F86]" office:value-type="float" office:value="61605.315235735" calcext:value-type="float">
            <text:p>61,605</text:p>
          </table:table-cell>
          <table:table-cell table:style-name="ce74" table:formula="of:=[.G81]+[.G86]" office:value-type="float" office:value="73353.2291073028" calcext:value-type="float">
            <text:p>73,353</text:p>
          </table:table-cell>
          <table:table-cell table:style-name="ce74" table:formula="of:=[.H81]+[.H86]" office:value-type="float" office:value="74642.6348273118" calcext:value-type="float">
            <text:p>74,643</text:p>
          </table:table-cell>
          <table:table-cell table:style-name="ce74" table:formula="of:=[.I81]+[.I86]" office:value-type="float" office:value="24229.1546541215" calcext:value-type="float">
            <text:p>24,229</text:p>
          </table:table-cell>
          <table:table-cell table:style-name="ce74" table:formula="of:=[.J81]+[.J86]" office:value-type="float" office:value="77210.1502091841" calcext:value-type="float">
            <text:p>77,210</text:p>
          </table:table-cell>
          <table:table-cell table:style-name="ce74" table:formula="of:=[.K81]+[.K86]" office:value-type="float" office:value="78482.6980869192" calcext:value-type="float">
            <text:p>78,483</text:p>
          </table:table-cell>
          <table:table-cell table:style-name="ce74" table:formula="of:=[.L81]+[.L86]" office:value-type="float" office:value="79743.5632508215" calcext:value-type="float">
            <text:p>79,744</text:p>
          </table:table-cell>
          <table:table-cell table:style-name="ce74" table:formula="of:=[.M81]+[.M86]" office:value-type="float" office:value="403763.796816781" calcext:value-type="float">
            <text:p>403,764</text:p>
          </table:table-cell>
          <table:table-cell table:number-columns-repeated="16371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TIR SIN AJUSTAR</text:p>
          </table:table-cell>
          <table:table-cell table:style-name="ce75" table:formula="of:=IRR([.C81:.M81])" office:value-type="percentage" office:value="0.137170846266682" calcext:value-type="percentage">
            <text:p>13.72 %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TIR AJUSTADA</text:p>
          </table:table-cell>
          <table:table-cell table:style-name="ce75" table:formula="of:=IRR([.C92:.M92])" office:value-type="percentage" office:value="0.142495676544458" calcext:value-type="percentage">
            <text:p>14.25 %</text:p>
          </table:table-cell>
          <table:table-cell table:number-columns-repeated="16381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2"/>
          <table:table-cell table:style-name="ce76" table:formula="of:=IRR([.C88:.M88])" office:value-type="percentage" office:value="0.172329115335359" calcext:value-type="percentage">
            <text:p>17 %</text:p>
          </table:table-cell>
          <table:table-cell table:number-columns-repeated="16381"/>
        </table:table-row>
      </table:table>
      <table:table table:name="b) Leasing" table:style-name="ta2">
        <table:table-column table:style-name="co12" table:default-cell-style-name="Default"/>
        <table:table-column table:style-name="co13" table:default-cell-style-name="ce10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number-columns-repeated="16371" table:default-cell-style-name="Default"/>
        <table:table-row table:style-name="ro1">
          <table:table-cell/>
          <table:table-cell table:style-name="ce1" office:value-type="string" calcext:value-type="string" table:number-columns-spanned="12" table:number-rows-spanned="1">
            <text:p>TALLER FLUJO DE CAJA 01</text:p>
          </table:table-cell>
          <table:covered-table-cell table:number-columns-repeated="11" table:style-name="ce37"/>
          <table:table-cell table:number-columns-repeated="16371"/>
        </table:table-row>
        <table:table-row table:style-name="ro2">
          <table:table-cell/>
          <table:table-cell table:style-name="ce2" office:value-type="string" calcext:value-type="string" table:number-columns-spanned="12" table:number-rows-spanned="1">
            <text:p>CREACION DE UNA NUEVA EMPRESA</text:p>
          </table:table-cell>
          <table:covered-table-cell table:number-columns-repeated="11" table:style-name="ce38"/>
          <table:table-cell table:number-columns-repeated="1637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A. FLUJO DE CAJA ECONOMICO</text:p>
          </table:table-cell>
          <table:table-cell table:number-columns-repeated="16382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Programa de Produccion</text:p>
          </table:table-cell>
          <table:table-cell table:number-columns-repeated="16382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RUBRO</text:p>
          </table:table-cell>
          <table:table-cell table:style-name="ce39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47"/>
          <table:covered-table-cell table:style-name="ce39"/>
          <table:table-cell table:number-columns-repeated="16371"/>
        </table:table-row>
        <table:table-row table:style-name="ro3">
          <table:table-cell/>
          <table:covered-table-cell table:style-name="ce5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D8]+1" office:value-type="float" office:value="2" calcext:value-type="float">
            <text:p>2</text:p>
          </table:table-cell>
          <table:table-cell table:style-name="ce40" table:formula="of:=[.E8]+1" office:value-type="float" office:value="3" calcext:value-type="float">
            <text:p>3</text:p>
          </table:table-cell>
          <table:table-cell table:style-name="ce40" table:formula="of:=[.F8]+1" office:value-type="float" office:value="4" calcext:value-type="float">
            <text:p>4</text:p>
          </table:table-cell>
          <table:table-cell table:style-name="ce40" table:formula="of:=[.G8]+1" office:value-type="float" office:value="5" calcext:value-type="float">
            <text:p>5</text:p>
          </table:table-cell>
          <table:table-cell table:style-name="ce40" table:formula="of:=[.H8]+1" office:value-type="float" office:value="6" calcext:value-type="float">
            <text:p>6</text:p>
          </table:table-cell>
          <table:table-cell table:style-name="ce40" table:formula="of:=[.I8]+1" office:value-type="float" office:value="7" calcext:value-type="float">
            <text:p>7</text:p>
          </table:table-cell>
          <table:table-cell table:style-name="ce40" table:formula="of:=[.J8]+1" office:value-type="float" office:value="8" calcext:value-type="float">
            <text:p>8</text:p>
          </table:table-cell>
          <table:table-cell table:style-name="ce40" table:formula="of:=[.K8]+1" office:value-type="float" office:value="9" calcext:value-type="float">
            <text:p>9</text:p>
          </table:table-cell>
          <table:table-cell table:style-name="ce116" table:formula="of:=[.L8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6" office:value-type="string" calcext:value-type="string">
            <text:p>Producción y venta en unidades</text:p>
          </table:table-cell>
          <table:table-cell table:style-name="ce41"/>
          <table:table-cell table:style-name="ce41" office:value-type="float" office:value="1000" calcext:value-type="float">
            <text:p>1000</text:p>
          </table:table-cell>
          <table:table-cell table:style-name="ce41" table:formula="of:=[.D9]*1.2" office:value-type="float" office:value="1200" calcext:value-type="float">
            <text:p>1200</text:p>
          </table:table-cell>
          <table:table-cell table:style-name="ce41" table:formula="of:=[.E9]*1.05" office:value-type="float" office:value="1260" calcext:value-type="float">
            <text:p>1260</text:p>
          </table:table-cell>
          <table:table-cell table:style-name="ce98" table:formula="of:=[.F9]*1.02" office:value-type="float" office:value="1285.2" calcext:value-type="float">
            <text:p>1285</text:p>
          </table:table-cell>
          <table:table-cell table:style-name="ce98" table:formula="of:=[.G9]*1.02" office:value-type="float" office:value="1310.904" calcext:value-type="float">
            <text:p>1311</text:p>
          </table:table-cell>
          <table:table-cell table:style-name="ce98" table:formula="of:=[.H9]*1.02" office:value-type="float" office:value="1337.12208" calcext:value-type="float">
            <text:p>1337</text:p>
          </table:table-cell>
          <table:table-cell table:style-name="ce98" table:formula="of:=[.I9]*1.02" office:value-type="float" office:value="1363.8645216" calcext:value-type="float">
            <text:p>1364</text:p>
          </table:table-cell>
          <table:table-cell table:style-name="ce98" table:formula="of:=[.J9]*1.02" office:value-type="float" office:value="1391.141812032" calcext:value-type="float">
            <text:p>1391</text:p>
          </table:table-cell>
          <table:table-cell table:style-name="ce98" table:formula="of:=[.K9]*1.02" office:value-type="float" office:value="1418.96464827264" calcext:value-type="float">
            <text:p>1419</text:p>
          </table:table-cell>
          <table:table-cell table:style-name="ce98" table:formula="of:=[.L9]*1.02" office:value-type="float" office:value="1447.34394123809" calcext:value-type="float">
            <text:p>1447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Precio de venta por unidad</text:p>
          </table:table-cell>
          <table:table-cell table:style-name="ce42"/>
          <table:table-cell table:number-columns-repeated="3" table:style-name="ce42" office:value-type="float" office:value="100" calcext:value-type="float">
            <text:p>100</text:p>
          </table:table-cell>
          <table:table-cell table:number-columns-repeated="7" table:style-name="ce42" office:value-type="float" office:value="110" calcext:value-type="float">
            <text:p>110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Ingreso por ventas</text:p>
          </table:table-cell>
          <table:table-cell table:style-name="ce43"/>
          <table:table-cell table:style-name="ce77" table:formula="of:=[.D9]*[.D10]" office:value-type="float" office:value="100000" calcext:value-type="float">
            <text:p><text:s/>100,000 </text:p>
          </table:table-cell>
          <table:table-cell table:style-name="ce77" table:formula="of:=[.E9]*[.E10]" office:value-type="float" office:value="120000" calcext:value-type="float">
            <text:p><text:s/>120,000 </text:p>
          </table:table-cell>
          <table:table-cell table:style-name="ce77" table:formula="of:=[.F9]*[.F10]" office:value-type="float" office:value="126000" calcext:value-type="float">
            <text:p><text:s/>126,000 </text:p>
          </table:table-cell>
          <table:table-cell table:style-name="ce77" table:formula="of:=[.G9]*[.G10]" office:value-type="float" office:value="141372" calcext:value-type="float">
            <text:p><text:s/>141,372 </text:p>
          </table:table-cell>
          <table:table-cell table:style-name="ce77" table:formula="of:=[.H9]*[.H10]" office:value-type="float" office:value="144199.44" calcext:value-type="float">
            <text:p><text:s/>144,199 </text:p>
          </table:table-cell>
          <table:table-cell table:style-name="ce77" table:formula="of:=[.I9]*[.I10]" office:value-type="float" office:value="147083.4288" calcext:value-type="float">
            <text:p><text:s/>147,083 </text:p>
          </table:table-cell>
          <table:table-cell table:style-name="ce77" table:formula="of:=[.J9]*[.J10]" office:value-type="float" office:value="150025.097376" calcext:value-type="float">
            <text:p><text:s/>150,025 </text:p>
          </table:table-cell>
          <table:table-cell table:style-name="ce77" table:formula="of:=[.K9]*[.K10]" office:value-type="float" office:value="153025.59932352" calcext:value-type="float">
            <text:p><text:s/>153,026 </text:p>
          </table:table-cell>
          <table:table-cell table:style-name="ce77" table:formula="of:=[.L9]*[.L10]" office:value-type="float" office:value="156086.11130999" calcext:value-type="float">
            <text:p><text:s/>156,086 </text:p>
          </table:table-cell>
          <table:table-cell table:style-name="ce77" table:formula="of:=[.M9]*[.M10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9"/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Presupuesto de Inversion</text:p>
          </table:table-cell>
          <table:table-cell table:number-columns-repeated="16382"/>
        </table:table-row>
        <table:table-row table:style-name="ro3">
          <table:table-cell/>
          <table:table-cell table:style-name="ce11" office:value-type="string" calcext:value-type="string">
            <text:p>Activos</text:p>
          </table:table-cell>
          <table:table-cell table:style-name="ce11" office:value-type="string" calcext:value-type="string">
            <text:p>Año 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Adquisicon de terrenos</text:p>
          </table:table-cell>
          <table:table-cell table:style-name="ce44" office:value-type="float" office:value="80000" calcext:value-type="float">
            <text:p><text:s/>80,000 </text:p>
          </table:table-cell>
          <table:table-cell table:style-name="ce78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Construccion de edificios</text:p>
          </table:table-cell>
          <table:table-cell table:style-name="ce44" office:value-type="float" office:value="200000" calcext:value-type="float">
            <text:p><text:s/>200,000 </text:p>
          </table:table-cell>
          <table:table-cell table:style-name="ce78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Maquinaria</text:p>
          </table:table-cell>
          <table:table-cell table:style-name="ce44" table:formula="of:=100000*0.4" office:value-type="float" office:value="40000" calcext:value-type="float">
            <text:p><text:s/>40,000 </text:p>
          </table:table-cell>
          <table:table-cell table:style-name="ce79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inversion Fija</text:p>
          </table:table-cell>
          <table:table-cell table:style-name="ce45" table:formula="of:=SUM([.C15:.C17])" office:value-type="float" office:value="320000" calcext:value-type="float">
            <text:p><text:s/>320,00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Capital de trabajo</text:p>
          </table:table-cell>
          <table:table-cell table:style-name="ce44" table:formula="of:=-[.C65]" office:value-type="float" office:value="25000" calcext:value-type="float">
            <text:p><text:s/>25,000 </text:p>
          </table:table-cell>
          <table:table-cell table:style-name="ce80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Capital de Trabajo</text:p>
          </table:table-cell>
          <table:table-cell table:style-name="ce45" table:formula="of:=[.C19]" office:value-type="float" office:value="25000" calcext:value-type="float">
            <text:p><text:s/>25,000 </text:p>
          </table:table-cell>
          <table:table-cell table:style-name="ce81"/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>
            <text:p>Total inversion </text:p>
          </table:table-cell>
          <table:table-cell table:style-name="ce46" table:formula="of:=[.C18]+[.C20]" office:value-type="float" office:value="345000" calcext:value-type="float">
            <text:p><text:s/>345,000 </text:p>
          </table:table-cell>
          <table:table-cell table:style-name="ce81"/>
          <table:table-cell table:number-columns-repeated="16380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Tabla de Depreciaciones nominal</text:p>
          </table:table-cell>
          <table:table-cell table:number-columns-repeated="16382"/>
        </table:table-row>
        <table:table-row table:style-name="ro3">
          <table:table-cell/>
          <table:table-cell table:style-name="ce15" office:value-type="string" calcext:value-type="string">
            <text:p>Activos</text:p>
          </table:table-cell>
          <table:table-cell table:style-name="ce82" office:value-type="string" calcext:value-type="string">
            <text:p>Vc</text:p>
          </table:table-cell>
          <table:table-cell table:style-name="ce82" office:value-type="string" calcext:value-type="string">
            <text:p>Vida util</text:p>
          </table:table-cell>
          <table:table-cell table:style-name="ce82" office:value-type="string" calcext:value-type="string">
            <text:p>Dep/año 1-6</text:p>
          </table:table-cell>
          <table:table-cell table:style-name="ce82" office:value-type="string" calcext:value-type="string">
            <text:p>Dep/año 7-10</text:p>
          </table:table-cell>
          <table:table-cell table:style-name="ce82" office:value-type="string" calcext:value-type="string">
            <text:p>Dep Acum</text:p>
          </table:table-cell>
          <table:table-cell table:style-name="ce99" office:value-type="string" calcext:value-type="string">
            <text:p>Valor Cont.</text:p>
          </table:table-cell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dificaciones</text:p>
          </table:table-cell>
          <table:table-cell table:style-name="ce48" table:formula="of:=[.C16]" office:value-type="float" office:value="200000" calcext:value-type="float">
            <text:p><text:s/>200,000 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formula="of:=[.C25]*(1/[.D25])" office:value-type="float" office:value="5000" calcext:value-type="float">
            <text:p>5000</text:p>
          </table:table-cell>
          <table:table-cell table:style-name="ce42" table:formula="of:=[.E25]" office:value-type="float" office:value="5000" calcext:value-type="float">
            <text:p>5000</text:p>
          </table:table-cell>
          <table:table-cell table:style-name="ce42" table:formula="of:=[.F25]*10" office:value-type="float" office:value="50000" calcext:value-type="float">
            <text:p>50000</text:p>
          </table:table-cell>
          <table:table-cell table:style-name="ce100" table:formula="of:=[.C25]-[.G25]" office:value-type="float" office:value="150000" calcext:value-type="float">
            <text:p><text:s/>150,000 </text:p>
          </table:table-cell>
          <table:table-cell table:style-name="ce104"/>
          <table:table-cell table:style-name="ce108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quipos </text:p>
          </table:table-cell>
          <table:table-cell table:style-name="ce48" table:formula="of:=[.C17]" office:value-type="float" office:value="40000" calcext:value-type="float">
            <text:p><text:s/>40,000 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formula="of:=[.C26]*(1/[.D26])" office:value-type="float" office:value="4000" calcext:value-type="float">
            <text:p>400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F26]*5" office:value-type="float" office:value="0" calcext:value-type="float">
            <text:p>0</text:p>
          </table:table-cell>
          <table:table-cell table:style-name="ce100"/>
          <table:table-cell table:style-name="ce78" table:number-columns-repeated="2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quipos año 6</text:p>
          </table:table-cell>
          <table:table-cell table:style-name="ce49" office:value-type="float" office:value="100000" calcext:value-type="float">
            <text:p><text:s/>100,000 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C27]*(1/[.D27])" office:value-type="float" office:value="10000" calcext:value-type="float">
            <text:p>10000</text:p>
          </table:table-cell>
          <table:table-cell table:style-name="ce42" table:formula="of:=[.F27]*4" office:value-type="float" office:value="40000" calcext:value-type="float">
            <text:p>40000</text:p>
          </table:table-cell>
          <table:table-cell table:style-name="ce100" table:formula="of:=[.C27]-[.G27]" office:value-type="float" office:value="60000" calcext:value-type="float">
            <text:p><text:s/>60,000 </text:p>
          </table:table-cell>
          <table:table-cell table:style-name="ce104"/>
          <table:table-cell table:style-name="ce108"/>
          <table:table-cell table:number-columns-repeated="16374"/>
        </table:table-row>
        <table:table-row table:style-name="ro3">
          <table:table-cell/>
          <table:table-cell table:style-name="ce17" office:value-type="string" calcext:value-type="string">
            <text:p>TOTAL</text:p>
          </table:table-cell>
          <table:table-cell table:style-name="ce43" table:number-columns-repeated="2"/>
          <table:table-cell table:style-name="ce97" table:formula="of:=SUM([.E25:.E27])" office:value-type="float" office:value="9000" calcext:value-type="float">
            <text:p>9000</text:p>
          </table:table-cell>
          <table:table-cell table:style-name="ce97" table:formula="of:=SUM([.F25:.F27])" office:value-type="float" office:value="15000" calcext:value-type="float">
            <text:p>15000</text:p>
          </table:table-cell>
          <table:table-cell table:style-name="ce43" table:formula="of:=SUM([.G25:.G27])" office:value-type="float" office:value="90000" calcext:value-type="float">
            <text:p>90000</text:p>
          </table:table-cell>
          <table:table-cell table:style-name="ce101" table:formula="of:=SUM([.H25:.H27])" office:value-type="float" office:value="210000" calcext:value-type="float">
            <text:p>210000</text:p>
          </table:table-cell>
          <table:table-cell table:style-name="ce10" table:number-columns-repeated="2"/>
          <table:table-cell table:number-columns-repeated="16374"/>
        </table:table-row>
        <table:table-row table:style-name="ro3" table:number-rows-repeated="2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18" office:value-type="string" calcext:value-type="string" table:number-columns-spanned="7" table:number-rows-spanned="1">
            <text:p>ESTADO DE GANANCIAS Y PERDIDAS</text:p>
          </table:table-cell>
          <table:covered-table-cell table:number-columns-repeated="6" table:style-name="ce50"/>
          <table:table-cell table:number-columns-repeated="16376"/>
        </table:table-row>
        <table:table-row table:style-name="ro3">
          <table:table-cell/>
          <table:table-cell table:style-name="ce19" office:value-type="string" calcext:value-type="string" table:number-columns-spanned="1" table:number-rows-spanned="2">
            <text:p>RUBRO</text:p>
          </table:table-cell>
          <table:table-cell table:style-name="ce39" office:value-type="string" calcext:value-type="string" table:number-columns-spanned="11" table:number-rows-spanned="1">
            <text:p>PERIODO</text:p>
          </table:table-cell>
          <table:covered-table-cell table:number-columns-repeated="9" table:style-name="ce47"/>
          <table:covered-table-cell table:style-name="ce39"/>
          <table:table-cell table:number-columns-repeated="16371"/>
        </table:table-row>
        <table:table-row table:style-name="ro3">
          <table:table-cell/>
          <table:covered-table-cell table:style-name="ce17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D33]+1" office:value-type="float" office:value="2" calcext:value-type="float">
            <text:p>2</text:p>
          </table:table-cell>
          <table:table-cell table:style-name="ce40" table:formula="of:=[.E33]+1" office:value-type="float" office:value="3" calcext:value-type="float">
            <text:p>3</text:p>
          </table:table-cell>
          <table:table-cell table:style-name="ce40" table:formula="of:=[.F33]+1" office:value-type="float" office:value="4" calcext:value-type="float">
            <text:p>4</text:p>
          </table:table-cell>
          <table:table-cell table:style-name="ce40" table:formula="of:=[.G33]+1" office:value-type="float" office:value="5" calcext:value-type="float">
            <text:p>5</text:p>
          </table:table-cell>
          <table:table-cell table:style-name="ce40" table:formula="of:=[.H33]+1" office:value-type="float" office:value="6" calcext:value-type="float">
            <text:p>6</text:p>
          </table:table-cell>
          <table:table-cell table:style-name="ce40" table:formula="of:=[.I33]+1" office:value-type="float" office:value="7" calcext:value-type="float">
            <text:p>7</text:p>
          </table:table-cell>
          <table:table-cell table:style-name="ce40" table:formula="of:=[.J33]+1" office:value-type="float" office:value="8" calcext:value-type="float">
            <text:p>8</text:p>
          </table:table-cell>
          <table:table-cell table:style-name="ce40" table:formula="of:=[.K33]+1" office:value-type="float" office:value="9" calcext:value-type="float">
            <text:p>9</text:p>
          </table:table-cell>
          <table:table-cell table:style-name="ce116" table:formula="of:=[.L33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20" office:value-type="string" calcext:value-type="string">
            <text:p>Ventas netas</text:p>
          </table:table-cell>
          <table:table-cell table:style-name="ce51"/>
          <table:table-cell table:style-name="ce51" table:formula="of:=[.D11]" office:value-type="float" office:value="100000" calcext:value-type="float">
            <text:p><text:s/>100,000 </text:p>
          </table:table-cell>
          <table:table-cell table:style-name="ce51" table:formula="of:=[.E11]" office:value-type="float" office:value="120000" calcext:value-type="float">
            <text:p><text:s/>120,000 </text:p>
          </table:table-cell>
          <table:table-cell table:style-name="ce51" table:formula="of:=[.F11]" office:value-type="float" office:value="126000" calcext:value-type="float">
            <text:p><text:s/>126,000 </text:p>
          </table:table-cell>
          <table:table-cell table:style-name="ce51" table:formula="of:=[.G11]" office:value-type="float" office:value="141372" calcext:value-type="float">
            <text:p><text:s/>141,372 </text:p>
          </table:table-cell>
          <table:table-cell table:style-name="ce51" table:formula="of:=[.H11]" office:value-type="float" office:value="144199.44" calcext:value-type="float">
            <text:p><text:s/>144,199 </text:p>
          </table:table-cell>
          <table:table-cell table:style-name="ce51" table:formula="of:=[.I11]" office:value-type="float" office:value="147083.4288" calcext:value-type="float">
            <text:p><text:s/>147,083 </text:p>
          </table:table-cell>
          <table:table-cell table:style-name="ce51" table:formula="of:=[.J11]" office:value-type="float" office:value="150025.097376" calcext:value-type="float">
            <text:p><text:s/>150,025 </text:p>
          </table:table-cell>
          <table:table-cell table:style-name="ce51" table:formula="of:=[.K11]" office:value-type="float" office:value="153025.59932352" calcext:value-type="float">
            <text:p><text:s/>153,026 </text:p>
          </table:table-cell>
          <table:table-cell table:style-name="ce51" table:formula="of:=[.L11]" office:value-type="float" office:value="156086.11130999" calcext:value-type="float">
            <text:p><text:s/>156,086 </text:p>
          </table:table-cell>
          <table:table-cell table:style-name="ce117" table:formula="of:=[.M11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variable</text:p>
          </table:table-cell>
          <table:table-cell table:style-name="ce42"/>
          <table:table-cell table:style-name="ce42" table:formula="of:=-[.D9]*30" office:value-type="float" office:value="-30000" calcext:value-type="float">
            <text:p>-30000</text:p>
          </table:table-cell>
          <table:table-cell table:style-name="ce42" table:formula="of:=-[.E9]*30" office:value-type="float" office:value="-36000" calcext:value-type="float">
            <text:p>-36000</text:p>
          </table:table-cell>
          <table:table-cell table:style-name="ce42" table:formula="of:=-[.F9]*30" office:value-type="float" office:value="-37800" calcext:value-type="float">
            <text:p>-37800</text:p>
          </table:table-cell>
          <table:table-cell table:style-name="ce42" table:formula="of:=-[.G9]*30" office:value-type="float" office:value="-38556" calcext:value-type="float">
            <text:p>-38556</text:p>
          </table:table-cell>
          <table:table-cell table:style-name="ce42" table:formula="of:=-[.H9]*30" office:value-type="float" office:value="-39327.12" calcext:value-type="float">
            <text:p>-39327.12</text:p>
          </table:table-cell>
          <table:table-cell table:style-name="ce139" table:formula="of:=-[.I9]*30" office:value-type="float" office:value="-40113.6624" calcext:value-type="float">
            <text:p>-40114</text:p>
          </table:table-cell>
          <table:table-cell table:style-name="ce139" table:formula="of:=-[.J9]*30" office:value-type="float" office:value="-40915.935648" calcext:value-type="float">
            <text:p>-40916</text:p>
          </table:table-cell>
          <table:table-cell table:style-name="ce139" table:formula="of:=-[.K9]*30" office:value-type="float" office:value="-41734.25436096" calcext:value-type="float">
            <text:p>-41734</text:p>
          </table:table-cell>
          <table:table-cell table:style-name="ce139" table:formula="of:=-[.L9]*30" office:value-type="float" office:value="-42568.9394481792" calcext:value-type="float">
            <text:p>-42569</text:p>
          </table:table-cell>
          <table:table-cell table:style-name="ce127" table:formula="of:=-[.M9]*30" office:value-type="float" office:value="-43420.3182371428" calcext:value-type="float">
            <text:p>-43420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fijo</text:p>
          </table:table-cell>
          <table:table-cell table:style-name="ce42"/>
          <table:table-cell table:number-columns-repeated="9" table:style-name="ce42" office:value-type="float" office:value="-20000" calcext:value-type="float">
            <text:p>-20000</text:p>
          </table:table-cell>
          <table:table-cell table:style-name="ce118" office:value-type="float" office:value="-20000" calcext:value-type="float">
            <text:p>-20000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Depreciaciones</text:p>
          </table:table-cell>
          <table:table-cell table:style-name="ce42"/>
          <table:table-cell table:style-name="ce83" table:formula="of:=-[.$E$28]" office:value-type="float" office:value="-9000" calcext:value-type="float">
            <text:p><text:s/>-9,000 </text:p>
          </table:table-cell>
          <table:table-cell table:style-name="ce83" table:formula="of:=-[.$E$28]" office:value-type="float" office:value="-9000" calcext:value-type="float">
            <text:p><text:s/>-9,000 </text:p>
          </table:table-cell>
          <table:table-cell table:style-name="ce83" table:formula="of:=-[.$E$28]" office:value-type="float" office:value="-9000" calcext:value-type="float">
            <text:p><text:s/>-9,000 </text:p>
          </table:table-cell>
          <table:table-cell table:style-name="ce83" table:formula="of:=-[.$E$28]" office:value-type="float" office:value="-9000" calcext:value-type="float">
            <text:p><text:s/>-9,000 </text:p>
          </table:table-cell>
          <table:table-cell table:style-name="ce83" table:formula="of:=-[.$E$28]" office:value-type="float" office:value="-9000" calcext:value-type="float">
            <text:p><text:s/>-9,000 </text:p>
          </table:table-cell>
          <table:table-cell table:style-name="ce83" table:formula="of:=-[.$E$28]" office:value-type="float" office:value="-9000" calcext:value-type="float">
            <text:p><text:s/>-9,000 </text:p>
          </table:table-cell>
          <table:table-cell table:style-name="ce83" table:formula="of:=-[.$F$28]" office:value-type="float" office:value="-15000" calcext:value-type="float">
            <text:p><text:s/>-15,000 </text:p>
          </table:table-cell>
          <table:table-cell table:style-name="ce83" table:formula="of:=-[.$F$28]" office:value-type="float" office:value="-15000" calcext:value-type="float">
            <text:p><text:s/>-15,000 </text:p>
          </table:table-cell>
          <table:table-cell table:style-name="ce83" table:formula="of:=-[.$F$28]" office:value-type="float" office:value="-15000" calcext:value-type="float">
            <text:p><text:s/>-15,000 </text:p>
          </table:table-cell>
          <table:table-cell table:style-name="ce83" table:formula="of:=-[.$F$28]" office:value-type="float" office:value="-15000" calcext:value-type="float">
            <text:p><text:s/>-15,000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Utilidad por venta de Maquinarias</text:p>
          </table:table-cell>
          <table:table-cell table:style-name="ce42"/>
          <table:table-cell table:style-name="ce48"/>
          <table:table-cell table:style-name="ce42" table:number-columns-repeated="3"/>
          <table:table-cell table:style-name="ce48"/>
          <table:table-cell table:style-name="ce105" table:formula="of:=[.C27]*0.5-[.E26]*4" office:value-type="float" office:value="34000" calcext:value-type="float">
            <text:p><text:s/>34,000 </text:p>
          </table:table-cell>
          <table:table-cell table:style-name="ce106" table:number-columns-repeated="3"/>
          <table:table-cell table:style-name="ce120"/>
          <table:table-cell table:number-columns-repeated="16371"/>
        </table:table-row>
        <table:table-row table:style-name="ro3">
          <table:table-cell/>
          <table:table-cell table:style-name="ce21" office:value-type="string" calcext:value-type="string">
            <text:p>Utilidad Imponible</text:p>
          </table:table-cell>
          <table:table-cell table:style-name="ce52"/>
          <table:table-cell table:style-name="ce84" table:formula="of:=SUM([.D34:.D38])" office:value-type="float" office:value="41000" calcext:value-type="float">
            <text:p><text:s/>41,000 </text:p>
          </table:table-cell>
          <table:table-cell table:style-name="ce84" table:formula="of:=SUM([.E34:.E38])" office:value-type="float" office:value="55000" calcext:value-type="float">
            <text:p><text:s/>55,000 </text:p>
          </table:table-cell>
          <table:table-cell table:style-name="ce84" table:formula="of:=SUM([.F34:.F38])" office:value-type="float" office:value="59200" calcext:value-type="float">
            <text:p><text:s/>59,200 </text:p>
          </table:table-cell>
          <table:table-cell table:style-name="ce84" table:formula="of:=SUM([.G34:.G38])" office:value-type="float" office:value="73816" calcext:value-type="float">
            <text:p><text:s/>73,816 </text:p>
          </table:table-cell>
          <table:table-cell table:style-name="ce84" table:formula="of:=SUM([.H34:.H38])" office:value-type="float" office:value="75872.32" calcext:value-type="float">
            <text:p><text:s/>75,872 </text:p>
          </table:table-cell>
          <table:table-cell table:style-name="ce84" table:formula="of:=SUM([.I34:.I38])" office:value-type="float" office:value="111969.7664" calcext:value-type="float">
            <text:p><text:s/>111,970 </text:p>
          </table:table-cell>
          <table:table-cell table:style-name="ce84" table:formula="of:=SUM([.J34:.J38])" office:value-type="float" office:value="74109.161728" calcext:value-type="float">
            <text:p><text:s/>74,109 </text:p>
          </table:table-cell>
          <table:table-cell table:style-name="ce84" table:formula="of:=SUM([.K34:.K38])" office:value-type="float" office:value="76291.34496256" calcext:value-type="float">
            <text:p><text:s/>76,291 </text:p>
          </table:table-cell>
          <table:table-cell table:style-name="ce84" table:formula="of:=SUM([.L34:.L38])" office:value-type="float" office:value="78517.1718618112" calcext:value-type="float">
            <text:p><text:s/>78,517 </text:p>
          </table:table-cell>
          <table:table-cell table:style-name="ce121" table:formula="of:=SUM([.M34:.M38])" office:value-type="float" office:value="80787.5152990475" calcext:value-type="float">
            <text:p><text:s/>80,788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Impuestos</text:p>
          </table:table-cell>
          <table:table-cell table:style-name="ce42"/>
          <table:table-cell table:style-name="ce85" table:formula="of:=-[.D39]*0.17" office:value-type="float" office:value="-6970" calcext:value-type="float">
            <text:p><text:s/>-6,970.0 </text:p>
          </table:table-cell>
          <table:table-cell table:style-name="ce85" table:formula="of:=-[.E39]*0.17" office:value-type="float" office:value="-9350" calcext:value-type="float">
            <text:p><text:s/>-9,350.0 </text:p>
          </table:table-cell>
          <table:table-cell table:style-name="ce85" table:formula="of:=-[.F39]*0.17" office:value-type="float" office:value="-10064" calcext:value-type="float">
            <text:p><text:s/>-10,064.0 </text:p>
          </table:table-cell>
          <table:table-cell table:style-name="ce85" table:formula="of:=-[.G39]*0.17" office:value-type="float" office:value="-12548.72" calcext:value-type="float">
            <text:p><text:s/>-12,548.7 </text:p>
          </table:table-cell>
          <table:table-cell table:style-name="ce85" table:formula="of:=-[.H39]*0.17" office:value-type="float" office:value="-12898.2944" calcext:value-type="float">
            <text:p><text:s/>-12,898.3 </text:p>
          </table:table-cell>
          <table:table-cell table:style-name="ce85" table:formula="of:=-[.I39]*0.17" office:value-type="float" office:value="-19034.860288" calcext:value-type="float">
            <text:p><text:s/>-19,034.9 </text:p>
          </table:table-cell>
          <table:table-cell table:style-name="ce85" table:formula="of:=-[.J39]*0.17" office:value-type="float" office:value="-12598.55749376" calcext:value-type="float">
            <text:p><text:s/>-12,598.6 </text:p>
          </table:table-cell>
          <table:table-cell table:style-name="ce85" table:formula="of:=-[.K39]*0.17" office:value-type="float" office:value="-12969.5286436352" calcext:value-type="float">
            <text:p><text:s/>-12,969.5 </text:p>
          </table:table-cell>
          <table:table-cell table:style-name="ce85" table:formula="of:=-[.L39]*0.17" office:value-type="float" office:value="-13347.9192165079" calcext:value-type="float">
            <text:p><text:s/>-13,347.9 </text:p>
          </table:table-cell>
          <table:table-cell table:style-name="ce122" table:formula="of:=-[.M39]*0.17" office:value-type="float" office:value="-13733.8776008381" calcext:value-type="float">
            <text:p><text:s/>-13,733.9 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Utlidad Neta</text:p>
          </table:table-cell>
          <table:table-cell table:style-name="ce43"/>
          <table:table-cell table:style-name="ce86" table:formula="of:=[.D39]+[.D40]" office:value-type="float" office:value="34030" calcext:value-type="float">
            <text:p><text:s/>34,030.0 </text:p>
          </table:table-cell>
          <table:table-cell table:style-name="ce86" table:formula="of:=[.E39]+[.E40]" office:value-type="float" office:value="45650" calcext:value-type="float">
            <text:p><text:s/>45,650.0 </text:p>
          </table:table-cell>
          <table:table-cell table:style-name="ce86" table:formula="of:=[.F39]+[.F40]" office:value-type="float" office:value="49136" calcext:value-type="float">
            <text:p><text:s/>49,136.0 </text:p>
          </table:table-cell>
          <table:table-cell table:style-name="ce86" table:formula="of:=[.G39]+[.G40]" office:value-type="float" office:value="61267.28" calcext:value-type="float">
            <text:p><text:s/>61,267.3 </text:p>
          </table:table-cell>
          <table:table-cell table:style-name="ce86" table:formula="of:=[.H39]+[.H40]" office:value-type="float" office:value="62974.0256" calcext:value-type="float">
            <text:p><text:s/>62,974.0 </text:p>
          </table:table-cell>
          <table:table-cell table:style-name="ce86" table:formula="of:=[.I39]+[.I40]" office:value-type="float" office:value="92934.906112" calcext:value-type="float">
            <text:p><text:s/>92,934.9 </text:p>
          </table:table-cell>
          <table:table-cell table:style-name="ce86" table:formula="of:=[.J39]+[.J40]" office:value-type="float" office:value="61510.60423424" calcext:value-type="float">
            <text:p><text:s/>61,510.6 </text:p>
          </table:table-cell>
          <table:table-cell table:style-name="ce86" table:formula="of:=[.K39]+[.K40]" office:value-type="float" office:value="63321.8163189248" calcext:value-type="float">
            <text:p><text:s/>63,321.8 </text:p>
          </table:table-cell>
          <table:table-cell table:style-name="ce86" table:formula="of:=[.L39]+[.L40]" office:value-type="float" office:value="65169.2526453033" calcext:value-type="float">
            <text:p><text:s/>65,169.3 </text:p>
          </table:table-cell>
          <table:table-cell table:style-name="ce123" table:formula="of:=[.M39]+[.M40]" office:value-type="float" office:value="67053.6376982094" calcext:value-type="float">
            <text:p><text:s/>67,053.6 </text:p>
          </table:table-cell>
          <table:table-cell table:number-columns-repeated="16371"/>
        </table:table-row>
        <table:table-row table:style-name="ro3" table:number-rows-repeated="3">
          <table:table-cell table:number-columns-repeated="2"/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B. FLUJO DE CAJA FINANCIERO</text:p>
          </table:table-cell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 table:number-columns-repeated="2"/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AMORTIZACION DE LEASING</text:p>
          </table:table-cell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 table:number-columns-repeated="2"/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Monto del Leasing</text:p>
          </table:table-cell>
          <table:table-cell table:style-name="ce53" table:formula="of:=100000*0.6" office:value-type="currency" office:currency="S/." office:value="60000" calcext:value-type="currency">
            <text:p><text:s/>S/. 60,000 </text:p>
          </table:table-cell>
          <table:table-cell table:style-name="ce88"/>
          <table:table-cell table:style-name="ce87" table:number-columns-repeated="4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n</text:p>
          </table:table-cell>
          <table:table-cell table:style-name="ce10" office:value-type="float" office:value="6" calcext:value-type="float">
            <text:p>6</text:p>
          </table:table-cell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uota Anual</text:p>
          </table:table-cell>
          <table:table-cell table:style-name="ce55" office:value-type="float" office:value="15000" calcext:value-type="float">
            <text:p>S/. 15,000</text:p>
          </table:table-cell>
          <table:table-cell table:style-name="ce87" table:number-columns-repeated="5"/>
          <table:table-cell table:number-columns-repeated="16376"/>
        </table:table-row>
        <table:table-row table:style-name="ro3">
          <table:table-cell table:number-columns-repeated="2"/>
          <table:table-cell table:style-name="ce55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ERIODO</text:p>
          </table:table-cell>
          <table:table-cell table:style-name="ce39" office:value-type="string" calcext:value-type="string" table:number-columns-spanned="7" table:number-rows-spanned="1">
            <text:p>PERIODO</text:p>
          </table:table-cell>
          <table:covered-table-cell table:number-columns-repeated="5" table:style-name="ce137"/>
          <table:covered-table-cell table:style-name="ce140"/>
          <table:table-cell table:style-name="ce142" table:number-columns-repeated="2"/>
          <table:table-cell table:number-columns-repeated="16373"/>
        </table:table-row>
        <table:table-row table:style-name="ro3">
          <table:table-cell/>
          <table:covered-table-cell table:style-name="ce5"/>
          <table:table-cell table:style-name="ce40" office:value-type="float" office:value="0" calcext:value-type="float">
            <text:p>0</text:p>
          </table:table-cell>
          <table:table-cell table:style-name="ce89" office:value-type="float" office:value="1" calcext:value-type="float">
            <text:p><text:s/>1.0 </text:p>
          </table:table-cell>
          <table:table-cell table:style-name="ce89" table:formula="of:=[.D54]+1" office:value-type="float" office:value="2" calcext:value-type="float">
            <text:p><text:s/>2.0 </text:p>
          </table:table-cell>
          <table:table-cell table:style-name="ce89" table:formula="of:=[.E54]+1" office:value-type="float" office:value="3" calcext:value-type="float">
            <text:p><text:s/>3.0 </text:p>
          </table:table-cell>
          <table:table-cell table:style-name="ce89" table:formula="of:=[.F54]+1" office:value-type="float" office:value="4" calcext:value-type="float">
            <text:p><text:s/>4.0 </text:p>
          </table:table-cell>
          <table:table-cell table:style-name="ce89" table:formula="of:=[.G54]+1" office:value-type="float" office:value="5" calcext:value-type="float">
            <text:p><text:s/>5.0 </text:p>
          </table:table-cell>
          <table:table-cell table:style-name="ce109" table:formula="of:=[.H54]+1" office:value-type="float" office:value="6" calcext:value-type="float">
            <text:p><text:s/>6.0 </text:p>
          </table:table-cell>
          <table:table-cell table:style-name="ce115" table:number-columns-repeated="5"/>
          <table:table-cell table:number-columns-repeated="16370"/>
        </table:table-row>
        <table:table-row table:style-name="ro3">
          <table:table-cell/>
          <table:table-cell table:style-name="ce22" office:value-type="string" calcext:value-type="string">
            <text:p>Monto de Leasing</text:p>
          </table:table-cell>
          <table:table-cell table:style-name="ce56" table:formula="of:=[.C49]" office:value-type="currency" office:currency="S/." office:value="60000" calcext:value-type="currency">
            <text:p><text:s/>S/. 60,000 </text:p>
          </table:table-cell>
          <table:table-cell table:style-name="ce90" table:number-columns-repeated="5"/>
          <table:table-cell table:style-name="ce110"/>
          <table:table-cell table:style-name="ce143" table:number-columns-repeated="2"/>
          <table:table-cell table:number-columns-repeated="16373"/>
        </table:table-row>
        <table:table-row table:style-name="ro3">
          <table:table-cell/>
          <table:table-cell table:style-name="ce24" office:value-type="string" calcext:value-type="string">
            <text:p>Cuota de Leasing</text:p>
          </table:table-cell>
          <table:table-cell table:style-name="ce136" office:value-type="float" office:value="0" calcext:value-type="float">
            <text:p>0</text:p>
          </table:table-cell>
          <table:table-cell table:style-name="ce138" table:formula="of:=[.$C$51]" office:value-type="float" office:value="15000" calcext:value-type="float">
            <text:p><text:s/>15,000 </text:p>
          </table:table-cell>
          <table:table-cell table:style-name="ce138" table:formula="of:=[.$C$51]" office:value-type="float" office:value="15000" calcext:value-type="float">
            <text:p><text:s/>15,000 </text:p>
          </table:table-cell>
          <table:table-cell table:style-name="ce138" table:formula="of:=[.$C$51]" office:value-type="float" office:value="15000" calcext:value-type="float">
            <text:p><text:s/>15,000 </text:p>
          </table:table-cell>
          <table:table-cell table:style-name="ce138" table:formula="of:=[.$C$51]" office:value-type="float" office:value="15000" calcext:value-type="float">
            <text:p><text:s/>15,000 </text:p>
          </table:table-cell>
          <table:table-cell table:style-name="ce138" table:formula="of:=[.$C$51]" office:value-type="float" office:value="15000" calcext:value-type="float">
            <text:p><text:s/>15,000 </text:p>
          </table:table-cell>
          <table:table-cell table:style-name="ce141" table:formula="of:=[.$C$51]" office:value-type="float" office:value="15000" calcext:value-type="float">
            <text:p><text:s/>15,000 </text:p>
          </table:table-cell>
          <table:table-cell table:style-name="ce143" table:number-columns-repeated="2"/>
          <table:table-cell table:number-columns-repeated="16373"/>
        </table:table-row>
        <table:table-row table:style-name="ro3">
          <table:table-cell table:number-columns-repeated="2"/>
          <table:table-cell table:style-name="ce10"/>
          <table:table-cell table:style-name="ce87" table:number-columns-repeated="5"/>
          <table:table-cell/>
          <table:table-cell table:style-name="ce78" table:number-columns-repeated="2"/>
          <table:table-cell table:number-columns-repeated="16373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4">
          <table:table-cell/>
          <table:table-cell table:style-name="ce25" office:value-type="string" calcext:value-type="string" table:number-columns-spanned="12" table:number-rows-spanned="1">
            <text:p>FLUJOS DE CAJA ECONOMICO Y FINANCIERO</text:p>
          </table:table-cell>
          <table:covered-table-cell table:number-columns-repeated="11" table:style-name="ce59"/>
          <table:table-cell table:number-columns-repeated="1637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26" office:value-type="string" calcext:value-type="string" table:number-columns-spanned="1" table:number-rows-spanned="2">
            <text:p>RUBROS</text:p>
          </table:table-cell>
          <table:table-cell table:style-name="ce60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94"/>
          <table:covered-table-cell table:style-name="ce124"/>
          <table:table-cell table:number-columns-repeated="16371"/>
        </table:table-row>
        <table:table-row table:style-name="ro3">
          <table:table-cell/>
          <table:covered-table-cell table:style-name="ce27"/>
          <table:table-cell table:style-name="ce40" office:value-type="float" office:value="0" calcext:value-type="float">
            <text:p>0</text:p>
          </table:table-cell>
          <table:table-cell table:style-name="ce40" table:formula="of:=[.C62]+1" office:value-type="float" office:value="1" calcext:value-type="float">
            <text:p>1</text:p>
          </table:table-cell>
          <table:table-cell table:style-name="ce40" table:formula="of:=[.D62]+1" office:value-type="float" office:value="2" calcext:value-type="float">
            <text:p>2</text:p>
          </table:table-cell>
          <table:table-cell table:style-name="ce40" table:formula="of:=[.E62]+1" office:value-type="float" office:value="3" calcext:value-type="float">
            <text:p>3</text:p>
          </table:table-cell>
          <table:table-cell table:style-name="ce40" table:formula="of:=[.F62]+1" office:value-type="float" office:value="4" calcext:value-type="float">
            <text:p>4</text:p>
          </table:table-cell>
          <table:table-cell table:style-name="ce40" table:formula="of:=[.G62]+1" office:value-type="float" office:value="5" calcext:value-type="float">
            <text:p>5</text:p>
          </table:table-cell>
          <table:table-cell table:style-name="ce40" table:formula="of:=[.H62]+1" office:value-type="float" office:value="6" calcext:value-type="float">
            <text:p>6</text:p>
          </table:table-cell>
          <table:table-cell table:style-name="ce40" table:formula="of:=[.I62]+1" office:value-type="float" office:value="7" calcext:value-type="float">
            <text:p>7</text:p>
          </table:table-cell>
          <table:table-cell table:style-name="ce40" table:formula="of:=[.J62]+1" office:value-type="float" office:value="8" calcext:value-type="float">
            <text:p>8</text:p>
          </table:table-cell>
          <table:table-cell table:style-name="ce40" table:formula="of:=[.K62]+1" office:value-type="float" office:value="9" calcext:value-type="float">
            <text:p>9</text:p>
          </table:table-cell>
          <table:table-cell table:style-name="ce116" table:formula="of:=[.L62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28" office:value-type="string" calcext:value-type="string" table:number-columns-spanned="12" table:number-rows-spanned="1">
            <text:p>Inversiones y Liquidación</text:p>
          </table:table-cell>
          <table:covered-table-cell table:number-columns-repeated="10" table:style-name="ce61"/>
          <table:covered-table-cell table:style-name="ce125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Activo Fijo (-)</text:p>
          </table:table-cell>
          <table:table-cell table:style-name="ce62" table:formula="of:=-[.C18]" office:value-type="float" office:value="-320000" calcext:value-type="float">
            <text:p>-320,000</text:p>
          </table:table-cell>
          <table:table-cell table:style-name="ce62" table:number-columns-repeated="5"/>
          <table:table-cell table:style-name="ce48" table:formula="of:=-[.C27]" office:value-type="float" office:value="-100000" calcext:value-type="float">
            <text:p><text:s/>(100,000)</text:p>
          </table:table-cell>
          <table:table-cell table:style-name="ce42" table:number-columns-repeated="3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Capital de Trabajo (-)</text:p>
          </table:table-cell>
          <table:table-cell table:style-name="ce62" table:formula="of:=([.D35]+[.D36])/2" office:value-type="float" office:value="-25000" calcext:value-type="float">
            <text:p>-25,000</text:p>
          </table:table-cell>
          <table:table-cell table:style-name="ce62" table:formula="of:=([.E35]+[.E36])/2-[.C65]" office:value-type="float" office:value="-3000" calcext:value-type="float">
            <text:p>-3,000</text:p>
          </table:table-cell>
          <table:table-cell table:style-name="ce62" table:formula="of:=([.F35]+[.F36])/2-[.D65]-[.C65]" office:value-type="float" office:value="-900" calcext:value-type="float">
            <text:p>-900</text:p>
          </table:table-cell>
          <table:table-cell table:style-name="ce62" table:formula="of:=([.G35]+[.G36])/2-[.E65]-[.D65]-[.C65]" office:value-type="float" office:value="-378" calcext:value-type="float">
            <text:p>-378</text:p>
          </table:table-cell>
          <table:table-cell table:style-name="ce62" table:formula="of:=([.H35]+[.H36])/2-[.F65]-[.E65]-[.D65]-[.C65]" office:value-type="float" office:value="-385.560000000001" calcext:value-type="float">
            <text:p>-386</text:p>
          </table:table-cell>
          <table:table-cell table:style-name="ce62" table:formula="of:=([.I35]+[.I36])/2-[.G65]-[.F65]-[.E65]-[.D65]-[.C65]" office:value-type="float" office:value="-393.271199999999" calcext:value-type="float">
            <text:p>-393</text:p>
          </table:table-cell>
          <table:table-cell table:style-name="ce62" table:formula="of:=([.J35]+[.J36])/2-[.H65]-[.G65]-[.F65]-[.E65]-[.D65]-[.C65]" office:value-type="float" office:value="-401.136624000003" calcext:value-type="float">
            <text:p>-401</text:p>
          </table:table-cell>
          <table:table-cell table:style-name="ce62" table:formula="of:=([.K35]+[.K36])/2-[.I65]-[.H65]-[.G65]-[.F65]-[.E65]-[.D65]-[.C65]" office:value-type="float" office:value="-409.159356479999" calcext:value-type="float">
            <text:p>-409</text:p>
          </table:table-cell>
          <table:table-cell table:style-name="ce62" table:formula="of:=([.L35]+[.L36])/2-[.J65]-[.I65]-[.H65]-[.G65]-[.F65]-[.E65]-[.D65]-[.C65]" office:value-type="float" office:value="-417.342543609604" calcext:value-type="float">
            <text:p>-417</text:p>
          </table:table-cell>
          <table:table-cell table:style-name="ce62" table:formula="of:=([.M35]+[.M36])/2-[.K65]-[.J65]-[.I65]-[.H65]-[.G65]-[.F65]-[.E65]-[.D65]-[.C65]" office:value-type="float" office:value="-425.689394481789" calcext:value-type="float">
            <text:p>-426</text:p>
          </table:table-cell>
          <table:table-cell table:style-name="ce120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Ingresos por venta de maquinaria (+)</text:p>
          </table:table-cell>
          <table:table-cell table:style-name="ce62" table:number-columns-repeated="6"/>
          <table:table-cell table:style-name="ce85" table:formula="of:=[.C27]*0.5" office:value-type="float" office:value="50000" calcext:value-type="float">
            <text:p><text:s/>50,000.0 </text:p>
          </table:table-cell>
          <table:table-cell table:style-name="ce42" table:number-columns-repeated="3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recupero Capital Trabajo (+)</text:p>
          </table:table-cell>
          <table:table-cell table:style-name="ce62" table:number-columns-repeated="6"/>
          <table:table-cell table:style-name="ce42" table:number-columns-repeated="4"/>
          <table:table-cell table:style-name="ce126" table:formula="of:=-SUM([.C65:.L65])" office:value-type="float" office:value="31710.1591185714" calcext:value-type="float">
            <text:p>31,710</text:p>
          </table:table-cell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recupero de Terreno (+)</text:p>
          </table:table-cell>
          <table:table-cell table:style-name="ce62" table:number-columns-repeated="6"/>
          <table:table-cell table:style-name="ce42" table:number-columns-repeated="4"/>
          <table:table-cell table:style-name="ce100" table:formula="of:=[.C15]" office:value-type="float" office:value="80000" calcext:value-type="float">
            <text:p><text:s/>80,000 </text:p>
          </table:table-cell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<text:s/>residual de Activo Fijo (+)</text:p>
          </table:table-cell>
          <table:table-cell table:style-name="ce62" table:number-columns-repeated="6"/>
          <table:table-cell table:style-name="ce42" table:number-columns-repeated="4"/>
          <table:table-cell table:style-name="ce127" table:formula="of:=[.H28]" office:value-type="float" office:value="210000" calcext:value-type="float">
            <text:p>210000</text:p>
          </table:table-cell>
          <table:table-cell table:number-columns-repeated="16371"/>
        </table:table-row>
        <table:table-row table:style-name="ro3">
          <table:table-cell/>
          <table:table-cell table:style-name="ce29" office:value-type="string" calcext:value-type="string">
            <text:p>Flujo de Inversiones</text:p>
          </table:table-cell>
          <table:table-cell table:style-name="ce63" table:formula="of:=SUM([.C64:.C69])" office:value-type="float" office:value="-345000" calcext:value-type="float">
            <text:p>-345,000</text:p>
          </table:table-cell>
          <table:table-cell table:style-name="ce63" table:formula="of:=SUM([.D64:.D69])" office:value-type="float" office:value="-3000" calcext:value-type="float">
            <text:p>-3,000</text:p>
          </table:table-cell>
          <table:table-cell table:style-name="ce63" table:formula="of:=SUM([.E64:.E69])" office:value-type="float" office:value="-900" calcext:value-type="float">
            <text:p>-900</text:p>
          </table:table-cell>
          <table:table-cell table:style-name="ce63" table:formula="of:=SUM([.F64:.F69])" office:value-type="float" office:value="-378" calcext:value-type="float">
            <text:p>-378</text:p>
          </table:table-cell>
          <table:table-cell table:style-name="ce63" table:formula="of:=SUM([.G64:.G69])" office:value-type="float" office:value="-385.560000000001" calcext:value-type="float">
            <text:p>-386</text:p>
          </table:table-cell>
          <table:table-cell table:style-name="ce63" table:formula="of:=SUM([.H64:.H69])" office:value-type="float" office:value="-393.271199999999" calcext:value-type="float">
            <text:p>-393</text:p>
          </table:table-cell>
          <table:table-cell table:style-name="ce63" table:formula="of:=SUM([.I64:.I69])" office:value-type="float" office:value="-50401.136624" calcext:value-type="float">
            <text:p>-50,401</text:p>
          </table:table-cell>
          <table:table-cell table:style-name="ce63" table:formula="of:=SUM([.J64:.J69])" office:value-type="float" office:value="-409.159356479999" calcext:value-type="float">
            <text:p>-409</text:p>
          </table:table-cell>
          <table:table-cell table:style-name="ce63" table:formula="of:=SUM([.K64:.K69])" office:value-type="float" office:value="-417.342543609604" calcext:value-type="float">
            <text:p>-417</text:p>
          </table:table-cell>
          <table:table-cell table:style-name="ce63" table:formula="of:=SUM([.L64:.L69])" office:value-type="float" office:value="-425.689394481789" calcext:value-type="float">
            <text:p>-426</text:p>
          </table:table-cell>
          <table:table-cell table:style-name="ce128" table:formula="of:=SUM([.M64:.M69])" office:value-type="float" office:value="321710.159118571" calcext:value-type="float">
            <text:p>321,710</text:p>
          </table:table-cell>
          <table:table-cell table:number-columns-repeated="16371"/>
        </table:table-row>
        <table:table-row table:style-name="ro3">
          <table:table-cell/>
          <table:table-cell table:style-name="ce30" office:value-type="string" calcext:value-type="string" table:number-columns-spanned="7" table:number-rows-spanned="1">
            <text:p>Costos y Gastos Operativos</text:p>
          </table:table-cell>
          <table:covered-table-cell table:number-columns-repeated="5" table:style-name="ce64"/>
          <table:covered-table-cell table:style-name="ce102"/>
          <table:table-cell table:style-name="ce106" table:number-columns-repeated="4"/>
          <table:table-cell table:style-name="ce120"/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Ingresos en efectivo (+)</text:p>
          </table:table-cell>
          <table:table-cell table:style-name="ce65" table:formula="of:=[.C11]" office:value-type="float" office:value="0" calcext:value-type="float">
            <text:p>0</text:p>
          </table:table-cell>
          <table:table-cell table:style-name="ce65" table:formula="of:=[.D11]" office:value-type="float" office:value="100000" calcext:value-type="float">
            <text:p>100,000</text:p>
          </table:table-cell>
          <table:table-cell table:style-name="ce65" table:formula="of:=[.E11]" office:value-type="float" office:value="120000" calcext:value-type="float">
            <text:p>120,000</text:p>
          </table:table-cell>
          <table:table-cell table:style-name="ce65" table:formula="of:=[.F11]" office:value-type="float" office:value="126000" calcext:value-type="float">
            <text:p>126,000</text:p>
          </table:table-cell>
          <table:table-cell table:style-name="ce65" table:formula="of:=[.G11]" office:value-type="float" office:value="141372" calcext:value-type="float">
            <text:p>141,372</text:p>
          </table:table-cell>
          <table:table-cell table:style-name="ce65" table:formula="of:=[.H11]" office:value-type="float" office:value="144199.44" calcext:value-type="float">
            <text:p>144,199</text:p>
          </table:table-cell>
          <table:table-cell table:style-name="ce65" table:formula="of:=[.I11]" office:value-type="float" office:value="147083.4288" calcext:value-type="float">
            <text:p>147,083</text:p>
          </table:table-cell>
          <table:table-cell table:style-name="ce65" table:formula="of:=[.J11]" office:value-type="float" office:value="150025.097376" calcext:value-type="float">
            <text:p>150,025</text:p>
          </table:table-cell>
          <table:table-cell table:style-name="ce65" table:formula="of:=[.K11]" office:value-type="float" office:value="153025.59932352" calcext:value-type="float">
            <text:p>153,026</text:p>
          </table:table-cell>
          <table:table-cell table:style-name="ce65" table:formula="of:=[.L11]" office:value-type="float" office:value="156086.11130999" calcext:value-type="float">
            <text:p>156,086</text:p>
          </table:table-cell>
          <table:table-cell table:style-name="ce129" table:formula="of:=[.M11]" office:value-type="float" office:value="159207.83353619" calcext:value-type="float">
            <text:p>159,208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Costos Fijos</text:p>
          </table:table-cell>
          <table:table-cell table:style-name="ce66"/>
          <table:table-cell table:style-name="ce62" table:formula="of:=[.D36]" office:value-type="float" office:value="-20000" calcext:value-type="float">
            <text:p>-20,000</text:p>
          </table:table-cell>
          <table:table-cell table:style-name="ce62" table:formula="of:=[.E36]" office:value-type="float" office:value="-20000" calcext:value-type="float">
            <text:p>-20,000</text:p>
          </table:table-cell>
          <table:table-cell table:style-name="ce62" table:formula="of:=[.F36]" office:value-type="float" office:value="-20000" calcext:value-type="float">
            <text:p>-20,000</text:p>
          </table:table-cell>
          <table:table-cell table:style-name="ce62" table:formula="of:=[.G36]" office:value-type="float" office:value="-20000" calcext:value-type="float">
            <text:p>-20,000</text:p>
          </table:table-cell>
          <table:table-cell table:style-name="ce62" table:formula="of:=[.H36]" office:value-type="float" office:value="-20000" calcext:value-type="float">
            <text:p>-20,000</text:p>
          </table:table-cell>
          <table:table-cell table:style-name="ce62" table:formula="of:=[.I36]" office:value-type="float" office:value="-20000" calcext:value-type="float">
            <text:p>-20,000</text:p>
          </table:table-cell>
          <table:table-cell table:style-name="ce62" table:formula="of:=[.J36]" office:value-type="float" office:value="-20000" calcext:value-type="float">
            <text:p>-20,000</text:p>
          </table:table-cell>
          <table:table-cell table:style-name="ce62" table:formula="of:=[.K36]" office:value-type="float" office:value="-20000" calcext:value-type="float">
            <text:p>-20,000</text:p>
          </table:table-cell>
          <table:table-cell table:style-name="ce62" table:formula="of:=[.L36]" office:value-type="float" office:value="-20000" calcext:value-type="float">
            <text:p>-20,000</text:p>
          </table:table-cell>
          <table:table-cell table:style-name="ce130" table:formula="of:=[.M36]" office:value-type="float" office:value="-20000" calcext:value-type="float">
            <text:p>-20,000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Costos Variables</text:p>
          </table:table-cell>
          <table:table-cell table:style-name="ce66"/>
          <table:table-cell table:style-name="ce62" table:formula="of:=[.D35]" office:value-type="float" office:value="-30000" calcext:value-type="float">
            <text:p>-30,000</text:p>
          </table:table-cell>
          <table:table-cell table:style-name="ce62" table:formula="of:=[.E35]" office:value-type="float" office:value="-36000" calcext:value-type="float">
            <text:p>-36,000</text:p>
          </table:table-cell>
          <table:table-cell table:style-name="ce62" table:formula="of:=[.F35]" office:value-type="float" office:value="-37800" calcext:value-type="float">
            <text:p>-37,800</text:p>
          </table:table-cell>
          <table:table-cell table:style-name="ce62" table:formula="of:=[.G35]" office:value-type="float" office:value="-38556" calcext:value-type="float">
            <text:p>-38,556</text:p>
          </table:table-cell>
          <table:table-cell table:style-name="ce62" table:formula="of:=[.H35]" office:value-type="float" office:value="-39327.12" calcext:value-type="float">
            <text:p>-39,327</text:p>
          </table:table-cell>
          <table:table-cell table:style-name="ce62" table:formula="of:=[.I35]" office:value-type="float" office:value="-40113.6624" calcext:value-type="float">
            <text:p>-40,114</text:p>
          </table:table-cell>
          <table:table-cell table:style-name="ce62" table:formula="of:=[.J35]" office:value-type="float" office:value="-40915.935648" calcext:value-type="float">
            <text:p>-40,916</text:p>
          </table:table-cell>
          <table:table-cell table:style-name="ce62" table:formula="of:=[.K35]" office:value-type="float" office:value="-41734.25436096" calcext:value-type="float">
            <text:p>-41,734</text:p>
          </table:table-cell>
          <table:table-cell table:style-name="ce62" table:formula="of:=[.L35]" office:value-type="float" office:value="-42568.9394481792" calcext:value-type="float">
            <text:p>-42,569</text:p>
          </table:table-cell>
          <table:table-cell table:style-name="ce130" table:formula="of:=[.M35]" office:value-type="float" office:value="-43420.3182371428" calcext:value-type="float">
            <text:p>-43,420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Impuestos y Tributos (-)</text:p>
          </table:table-cell>
          <table:table-cell table:style-name="ce67"/>
          <table:table-cell table:style-name="ce95" table:formula="of:=[.D40]" office:value-type="float" office:value="-6970" calcext:value-type="float">
            <text:p>-6,970</text:p>
          </table:table-cell>
          <table:table-cell table:style-name="ce95" table:formula="of:=[.E40]" office:value-type="float" office:value="-9350" calcext:value-type="float">
            <text:p>-9,350</text:p>
          </table:table-cell>
          <table:table-cell table:style-name="ce95" table:formula="of:=[.F40]" office:value-type="float" office:value="-10064" calcext:value-type="float">
            <text:p>-10,064</text:p>
          </table:table-cell>
          <table:table-cell table:style-name="ce95" table:formula="of:=[.G40]" office:value-type="float" office:value="-12548.72" calcext:value-type="float">
            <text:p>-12,549</text:p>
          </table:table-cell>
          <table:table-cell table:style-name="ce95" table:formula="of:=[.H40]" office:value-type="float" office:value="-12898.2944" calcext:value-type="float">
            <text:p>-12,898</text:p>
          </table:table-cell>
          <table:table-cell table:style-name="ce95" table:formula="of:=[.I40]" office:value-type="float" office:value="-19034.860288" calcext:value-type="float">
            <text:p>-19,035</text:p>
          </table:table-cell>
          <table:table-cell table:style-name="ce95" table:formula="of:=[.J40]" office:value-type="float" office:value="-12598.55749376" calcext:value-type="float">
            <text:p>-12,599</text:p>
          </table:table-cell>
          <table:table-cell table:style-name="ce95" table:formula="of:=[.K40]" office:value-type="float" office:value="-12969.5286436352" calcext:value-type="float">
            <text:p>-12,970</text:p>
          </table:table-cell>
          <table:table-cell table:style-name="ce95" table:formula="of:=[.L40]" office:value-type="float" office:value="-13347.9192165079" calcext:value-type="float">
            <text:p>-13,348</text:p>
          </table:table-cell>
          <table:table-cell table:style-name="ce131" table:formula="of:=[.M40]" office:value-type="float" office:value="-13733.8776008381" calcext:value-type="float">
            <text:p>-13,734</text:p>
          </table:table-cell>
          <table:table-cell table:number-columns-repeated="16371"/>
        </table:table-row>
        <table:table-row table:style-name="ro3">
          <table:table-cell/>
          <table:table-cell table:style-name="ce32" office:value-type="string" calcext:value-type="string">
            <text:p>Flujo de Caja Operativo</text:p>
          </table:table-cell>
          <table:table-cell table:style-name="ce68"/>
          <table:table-cell table:style-name="ce68" table:formula="of:=SUM([.D72:.D75])" office:value-type="float" office:value="43030" calcext:value-type="float">
            <text:p>43,030</text:p>
          </table:table-cell>
          <table:table-cell table:style-name="ce68" table:formula="of:=SUM([.E72:.E75])" office:value-type="float" office:value="54650" calcext:value-type="float">
            <text:p>54,650</text:p>
          </table:table-cell>
          <table:table-cell table:style-name="ce68" table:formula="of:=SUM([.F72:.F75])" office:value-type="float" office:value="58136" calcext:value-type="float">
            <text:p>58,136</text:p>
          </table:table-cell>
          <table:table-cell table:style-name="ce68" table:formula="of:=SUM([.G72:.G75])" office:value-type="float" office:value="70267.28" calcext:value-type="float">
            <text:p>70,267</text:p>
          </table:table-cell>
          <table:table-cell table:style-name="ce68" table:formula="of:=SUM([.H72:.H75])" office:value-type="float" office:value="71974.0256" calcext:value-type="float">
            <text:p>71,974</text:p>
          </table:table-cell>
          <table:table-cell table:style-name="ce68" table:formula="of:=SUM([.I72:.I75])" office:value-type="float" office:value="67934.906112" calcext:value-type="float">
            <text:p>67,935</text:p>
          </table:table-cell>
          <table:table-cell table:style-name="ce68" table:formula="of:=SUM([.J72:.J75])" office:value-type="float" office:value="76510.60423424" calcext:value-type="float">
            <text:p>76,511</text:p>
          </table:table-cell>
          <table:table-cell table:style-name="ce68" table:formula="of:=SUM([.K72:.K75])" office:value-type="float" office:value="78321.8163189248" calcext:value-type="float">
            <text:p>78,322</text:p>
          </table:table-cell>
          <table:table-cell table:style-name="ce68" table:formula="of:=SUM([.L72:.L75])" office:value-type="float" office:value="80169.2526453033" calcext:value-type="float">
            <text:p>80,169</text:p>
          </table:table-cell>
          <table:table-cell table:style-name="ce132" table:formula="of:=SUM([.M72:.M75])" office:value-type="float" office:value="82053.6376982094" calcext:value-type="float">
            <text:p>82,054</text:p>
          </table:table-cell>
          <table:table-cell table:number-columns-repeated="16371"/>
        </table:table-row>
        <table:table-row table:style-name="ro3">
          <table:table-cell/>
          <table:table-cell table:style-name="ce33" office:value-type="string" calcext:value-type="string">
            <text:p>Flujo de Caja Económico (FCE)</text:p>
          </table:table-cell>
          <table:table-cell table:style-name="ce69" table:formula="of:=[.C70]+[.C76]" office:value-type="float" office:value="-345000" calcext:value-type="float">
            <text:p>-345,000</text:p>
          </table:table-cell>
          <table:table-cell table:style-name="ce69" table:formula="of:=[.D70]+[.D76]" office:value-type="float" office:value="40030" calcext:value-type="float">
            <text:p>40,030</text:p>
          </table:table-cell>
          <table:table-cell table:style-name="ce69" table:formula="of:=[.E70]+[.E76]" office:value-type="float" office:value="53750" calcext:value-type="float">
            <text:p>53,750</text:p>
          </table:table-cell>
          <table:table-cell table:style-name="ce69" table:formula="of:=[.F70]+[.F76]" office:value-type="float" office:value="57758" calcext:value-type="float">
            <text:p>57,758</text:p>
          </table:table-cell>
          <table:table-cell table:style-name="ce69" table:formula="of:=[.G70]+[.G76]" office:value-type="float" office:value="69881.72" calcext:value-type="float">
            <text:p>69,882</text:p>
          </table:table-cell>
          <table:table-cell table:style-name="ce69" table:formula="of:=[.H70]+[.H76]" office:value-type="float" office:value="71580.7544" calcext:value-type="float">
            <text:p>71,581</text:p>
          </table:table-cell>
          <table:table-cell table:style-name="ce69" table:formula="of:=[.I70]+[.I76]" office:value-type="float" office:value="17533.769488" calcext:value-type="float">
            <text:p>17,534</text:p>
          </table:table-cell>
          <table:table-cell table:style-name="ce69" table:formula="of:=[.J70]+[.J76]" office:value-type="float" office:value="76101.44487776" calcext:value-type="float">
            <text:p>76,101</text:p>
          </table:table-cell>
          <table:table-cell table:style-name="ce69" table:formula="of:=[.K70]+[.K76]" office:value-type="float" office:value="77904.4737753152" calcext:value-type="float">
            <text:p>77,904</text:p>
          </table:table-cell>
          <table:table-cell table:style-name="ce69" table:formula="of:=[.L70]+[.L76]" office:value-type="float" office:value="79743.5632508215" calcext:value-type="float">
            <text:p>79,744</text:p>
          </table:table-cell>
          <table:table-cell table:style-name="ce133" table:formula="of:=[.M70]+[.M76]" office:value-type="float" office:value="403763.796816781" calcext:value-type="float">
            <text:p>403,764</text:p>
          </table:table-cell>
          <table:table-cell table:number-columns-repeated="16371"/>
        </table:table-row>
        <table:table-row table:style-name="ro3">
          <table:table-cell/>
          <table:table-cell table:style-name="ce34" office:value-type="string" calcext:value-type="string" table:number-columns-spanned="7" table:number-rows-spanned="1">
            <text:p>Financiamiento Neto</text:p>
          </table:table-cell>
          <table:covered-table-cell table:number-columns-repeated="5" table:style-name="ce70"/>
          <table:covered-table-cell table:style-name="ce103"/>
          <table:table-cell table:style-name="ce107" table:number-columns-repeated="4"/>
          <table:table-cell table:style-name="ce134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- Cuota de Leasing</text:p>
          </table:table-cell>
          <table:table-cell table:style-name="ce71"/>
          <table:table-cell table:style-name="ce71" table:formula="of:=-[.D56]" office:value-type="float" office:value="-15000" calcext:value-type="float">
            <text:p>-15,000.00</text:p>
          </table:table-cell>
          <table:table-cell table:style-name="ce71" table:formula="of:=-[.E56]" office:value-type="float" office:value="-15000" calcext:value-type="float">
            <text:p>-15,000.00</text:p>
          </table:table-cell>
          <table:table-cell table:style-name="ce71" table:formula="of:=-[.F56]" office:value-type="float" office:value="-15000" calcext:value-type="float">
            <text:p>-15,000.00</text:p>
          </table:table-cell>
          <table:table-cell table:style-name="ce71" table:formula="of:=-[.G56]" office:value-type="float" office:value="-15000" calcext:value-type="float">
            <text:p>-15,000.00</text:p>
          </table:table-cell>
          <table:table-cell table:style-name="ce71" table:formula="of:=-[.H56]" office:value-type="float" office:value="-15000" calcext:value-type="float">
            <text:p>-15,000.00</text:p>
          </table:table-cell>
          <table:table-cell table:style-name="ce71" table:formula="of:=-[.I56]" office:value-type="float" office:value="-15000" calcext:value-type="float">
            <text:p>-15,000.00</text:p>
          </table:table-cell>
          <table:table-cell table:style-name="ce71" table:number-columns-repeated="2"/>
          <table:table-cell table:style-name="ce42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+ Escudo Fiscal de cuota Leasing</text:p>
          </table:table-cell>
          <table:table-cell table:style-name="ce72"/>
          <table:table-cell table:style-name="ce96" table:formula="of:=-[.D79]*0.17" office:value-type="float" office:value="2550" calcext:value-type="float">
            <text:p>2550.00</text:p>
          </table:table-cell>
          <table:table-cell table:style-name="ce96" table:formula="of:=-[.E79]*0.17" office:value-type="float" office:value="2550" calcext:value-type="float">
            <text:p>2550.00</text:p>
          </table:table-cell>
          <table:table-cell table:style-name="ce96" table:formula="of:=-[.F79]*0.17" office:value-type="float" office:value="2550" calcext:value-type="float">
            <text:p>2550.00</text:p>
          </table:table-cell>
          <table:table-cell table:style-name="ce96" table:formula="of:=-[.G79]*0.17" office:value-type="float" office:value="2550" calcext:value-type="float">
            <text:p>2550.00</text:p>
          </table:table-cell>
          <table:table-cell table:style-name="ce96" table:formula="of:=-[.H79]*0.17" office:value-type="float" office:value="2550" calcext:value-type="float">
            <text:p>2550.00</text:p>
          </table:table-cell>
          <table:table-cell table:style-name="ce96" table:formula="of:=-[.I79]*0.17" office:value-type="float" office:value="2550" calcext:value-type="float">
            <text:p>2550.00</text:p>
          </table:table-cell>
          <table:table-cell table:style-name="ce96" table:number-columns-repeated="2"/>
          <table:table-cell table:style-name="ce42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23" office:value-type="string" calcext:value-type="string">
            <text:p>Flujo Financiamiento Neto</text:p>
          </table:table-cell>
          <table:table-cell table:style-name="ce71" table:formula="of:=SUM([.C79:.C80])" office:value-type="float" office:value="0" calcext:value-type="float">
            <text:p>0.00</text:p>
          </table:table-cell>
          <table:table-cell table:style-name="ce71" table:formula="of:=SUM([.D79:.D80])" office:value-type="float" office:value="-12450" calcext:value-type="float">
            <text:p>-12,450.00</text:p>
          </table:table-cell>
          <table:table-cell table:style-name="ce71" table:formula="of:=SUM([.E79:.E80])" office:value-type="float" office:value="-12450" calcext:value-type="float">
            <text:p>-12,450.00</text:p>
          </table:table-cell>
          <table:table-cell table:style-name="ce71" table:formula="of:=SUM([.F79:.F80])" office:value-type="float" office:value="-12450" calcext:value-type="float">
            <text:p>-12,450.00</text:p>
          </table:table-cell>
          <table:table-cell table:style-name="ce71" table:formula="of:=SUM([.G79:.G80])" office:value-type="float" office:value="-12450" calcext:value-type="float">
            <text:p>-12,450.00</text:p>
          </table:table-cell>
          <table:table-cell table:style-name="ce71" table:formula="of:=SUM([.H79:.H80])" office:value-type="float" office:value="-12450" calcext:value-type="float">
            <text:p>-12,450.00</text:p>
          </table:table-cell>
          <table:table-cell table:style-name="ce71" table:formula="of:=SUM([.I79:.I80])" office:value-type="float" office:value="-12450" calcext:value-type="float">
            <text:p>-12,450.00</text:p>
          </table:table-cell>
          <table:table-cell table:style-name="ce71" table:number-columns-repeated="2"/>
          <table:table-cell table:style-name="ce42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35" office:value-type="string" calcext:value-type="string">
            <text:p>Flujo de Caja Financiero (FCF)</text:p>
          </table:table-cell>
          <table:table-cell table:style-name="ce73" table:formula="of:=[.C77]+[.C81]" office:value-type="float" office:value="-345000" calcext:value-type="float">
            <text:p>-345,000</text:p>
          </table:table-cell>
          <table:table-cell table:style-name="ce73" table:formula="of:=[.D77]+[.D81]" office:value-type="float" office:value="27580" calcext:value-type="float">
            <text:p>27,580</text:p>
          </table:table-cell>
          <table:table-cell table:style-name="ce73" table:formula="of:=[.E77]+[.E81]" office:value-type="float" office:value="41300" calcext:value-type="float">
            <text:p>41,300</text:p>
          </table:table-cell>
          <table:table-cell table:style-name="ce73" table:formula="of:=[.F77]+[.F81]" office:value-type="float" office:value="45308" calcext:value-type="float">
            <text:p>45,308</text:p>
          </table:table-cell>
          <table:table-cell table:style-name="ce73" table:formula="of:=[.G77]+[.G81]" office:value-type="float" office:value="57431.72" calcext:value-type="float">
            <text:p>57,432</text:p>
          </table:table-cell>
          <table:table-cell table:style-name="ce73" table:formula="of:=[.H77]+[.H81]" office:value-type="float" office:value="59130.7544" calcext:value-type="float">
            <text:p>59,131</text:p>
          </table:table-cell>
          <table:table-cell table:style-name="ce73" table:formula="of:=[.I77]+[.I81]" office:value-type="float" office:value="5083.76948800002" calcext:value-type="float">
            <text:p>5,084</text:p>
          </table:table-cell>
          <table:table-cell table:style-name="ce73" table:formula="of:=[.J77]+[.J81]" office:value-type="float" office:value="76101.44487776" calcext:value-type="float">
            <text:p>76,101</text:p>
          </table:table-cell>
          <table:table-cell table:style-name="ce73" table:formula="of:=[.K77]+[.K81]" office:value-type="float" office:value="77904.4737753152" calcext:value-type="float">
            <text:p>77,904</text:p>
          </table:table-cell>
          <table:table-cell table:style-name="ce73" table:formula="of:=[.L77]+[.L81]" office:value-type="float" office:value="79743.5632508215" calcext:value-type="float">
            <text:p>79,744</text:p>
          </table:table-cell>
          <table:table-cell table:style-name="ce135" table:formula="of:=[.M77]+[.M81]" office:value-type="float" office:value="403763.796816781" calcext:value-type="float">
            <text:p>403,764</text:p>
          </table:table-cell>
          <table:table-cell table:number-columns-repeated="16371"/>
        </table:table-row>
        <table:table-row table:style-name="ro3">
          <table:table-cell/>
          <table:table-cell table:style-name="ce36" office:value-type="string" calcext:value-type="string">
            <text:p>(*) sin depreciaciones</text:p>
          </table:table-cell>
          <table:table-cell table:style-name="ce36" table:number-columns-repeated="6"/>
          <table:table-cell table:number-columns-repeated="16376"/>
        </table:table-row>
        <table:table-row table:style-name="ro3">
          <table:table-cell/>
          <table:table-cell table:style-name="ce36" office:value-type="string" calcext:value-type="string">
            <text:p>(**) sin amortizacion de intangibles</text:p>
          </table:table-cell>
          <table:table-cell table:style-name="ce36" table:number-columns-repeated="6"/>
          <table:table-cell table:number-columns-repeated="16376"/>
        </table:table-row>
        <table:table-row table:style-name="ro3">
          <table:table-cell/>
          <table:table-cell table:style-name="Default" office:value-type="string" calcext:value-type="string">
            <text:p>Flujo de Caja Ajustado</text:p>
          </table:table-cell>
          <table:table-cell/>
          <table:table-cell table:style-name="ce74" table:formula="of:=[.D75]+[.D80]" office:value-type="float" office:value="-4420" calcext:value-type="float">
            <text:p>-4,420</text:p>
          </table:table-cell>
          <table:table-cell table:style-name="ce74" table:formula="of:=[.E75]+[.E80]" office:value-type="float" office:value="-6800" calcext:value-type="float">
            <text:p>-6,800</text:p>
          </table:table-cell>
          <table:table-cell table:style-name="ce74" table:formula="of:=[.F75]+[.F80]" office:value-type="float" office:value="-7514" calcext:value-type="float">
            <text:p>-7,514</text:p>
          </table:table-cell>
          <table:table-cell table:style-name="ce74" table:formula="of:=[.G75]+[.G80]" office:value-type="float" office:value="-9998.72" calcext:value-type="float">
            <text:p>-9,999</text:p>
          </table:table-cell>
          <table:table-cell table:style-name="ce74" table:formula="of:=[.H75]+[.H80]" office:value-type="float" office:value="-10348.2944" calcext:value-type="float">
            <text:p>-10,348</text:p>
          </table:table-cell>
          <table:table-cell table:style-name="ce74" table:formula="of:=[.I75]+[.I80]" office:value-type="float" office:value="-16484.860288" calcext:value-type="float">
            <text:p>-16,485</text:p>
          </table:table-cell>
          <table:table-cell table:style-name="ce74" table:formula="of:=[.J75]+[.J80]" office:value-type="float" office:value="-12598.55749376" calcext:value-type="float">
            <text:p>-12,599</text:p>
          </table:table-cell>
          <table:table-cell table:style-name="ce74" table:formula="of:=[.K75]+[.K80]" office:value-type="float" office:value="-12969.5286436352" calcext:value-type="float">
            <text:p>-12,970</text:p>
          </table:table-cell>
          <table:table-cell table:style-name="ce74" table:formula="of:=[.L75]+[.L80]" office:value-type="float" office:value="-13347.9192165079" calcext:value-type="float">
            <text:p>-13,348</text:p>
          </table:table-cell>
          <table:table-cell table:style-name="ce74" table:formula="of:=[.M75]+[.M80]" office:value-type="float" office:value="-13733.8776008381" calcext:value-type="float">
            <text:p>-13,734</text:p>
          </table:table-cell>
          <table:table-cell table:number-columns-repeated="16371"/>
        </table:table-row>
      </table:table>
      <table:table table:name="c) Capacidad de pago" table:style-name="ta3">
        <table:table-column table:style-name="co12" table:default-cell-style-name="Default"/>
        <table:table-column table:style-name="co13" table:default-cell-style-name="ce10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number-columns-repeated="16371" table:default-cell-style-name="Default"/>
        <table:table-row table:style-name="ro1">
          <table:table-cell/>
          <table:table-cell table:style-name="ce1" office:value-type="string" calcext:value-type="string" table:number-columns-spanned="12" table:number-rows-spanned="1">
            <text:p>TALLER FLUJO DE CAJA 01</text:p>
          </table:table-cell>
          <table:covered-table-cell table:number-columns-repeated="11" table:style-name="ce37"/>
          <table:table-cell table:number-columns-repeated="16371"/>
        </table:table-row>
        <table:table-row table:style-name="ro2">
          <table:table-cell/>
          <table:table-cell table:style-name="ce2" office:value-type="string" calcext:value-type="string" table:number-columns-spanned="12" table:number-rows-spanned="1">
            <text:p>CREACION DE UNA NUEVA EMPRESA</text:p>
          </table:table-cell>
          <table:covered-table-cell table:number-columns-repeated="11" table:style-name="ce38"/>
          <table:table-cell table:number-columns-repeated="1637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A. FLUJO DE CAJA ECONOMICO</text:p>
          </table:table-cell>
          <table:table-cell table:number-columns-repeated="16382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Programa de Produccion</text:p>
          </table:table-cell>
          <table:table-cell table:number-columns-repeated="16382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RUBRO</text:p>
          </table:table-cell>
          <table:table-cell table:style-name="ce39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47"/>
          <table:covered-table-cell table:style-name="ce39"/>
          <table:table-cell table:number-columns-repeated="16371"/>
        </table:table-row>
        <table:table-row table:style-name="ro3">
          <table:table-cell/>
          <table:covered-table-cell table:style-name="ce5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D8]+1" office:value-type="float" office:value="2" calcext:value-type="float">
            <text:p>2</text:p>
          </table:table-cell>
          <table:table-cell table:style-name="ce40" table:formula="of:=[.E8]+1" office:value-type="float" office:value="3" calcext:value-type="float">
            <text:p>3</text:p>
          </table:table-cell>
          <table:table-cell table:style-name="ce40" table:formula="of:=[.F8]+1" office:value-type="float" office:value="4" calcext:value-type="float">
            <text:p>4</text:p>
          </table:table-cell>
          <table:table-cell table:style-name="ce40" table:formula="of:=[.G8]+1" office:value-type="float" office:value="5" calcext:value-type="float">
            <text:p>5</text:p>
          </table:table-cell>
          <table:table-cell table:style-name="ce40" table:formula="of:=[.H8]+1" office:value-type="float" office:value="6" calcext:value-type="float">
            <text:p>6</text:p>
          </table:table-cell>
          <table:table-cell table:style-name="ce40" table:formula="of:=[.I8]+1" office:value-type="float" office:value="7" calcext:value-type="float">
            <text:p>7</text:p>
          </table:table-cell>
          <table:table-cell table:style-name="ce40" table:formula="of:=[.J8]+1" office:value-type="float" office:value="8" calcext:value-type="float">
            <text:p>8</text:p>
          </table:table-cell>
          <table:table-cell table:style-name="ce40" table:formula="of:=[.K8]+1" office:value-type="float" office:value="9" calcext:value-type="float">
            <text:p>9</text:p>
          </table:table-cell>
          <table:table-cell table:style-name="ce116" table:formula="of:=[.L8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6" office:value-type="string" calcext:value-type="string">
            <text:p>Producción y venta en unidades</text:p>
          </table:table-cell>
          <table:table-cell table:style-name="ce41"/>
          <table:table-cell table:style-name="ce41" office:value-type="float" office:value="1000" calcext:value-type="float">
            <text:p>1000</text:p>
          </table:table-cell>
          <table:table-cell table:style-name="ce41" table:formula="of:=[.D9]*1.2" office:value-type="float" office:value="1200" calcext:value-type="float">
            <text:p>1200</text:p>
          </table:table-cell>
          <table:table-cell table:style-name="ce41" table:formula="of:=[.E9]*1.05" office:value-type="float" office:value="1260" calcext:value-type="float">
            <text:p>1260</text:p>
          </table:table-cell>
          <table:table-cell table:style-name="ce98" table:formula="of:=[.F9]*1.02" office:value-type="float" office:value="1285.2" calcext:value-type="float">
            <text:p>1285</text:p>
          </table:table-cell>
          <table:table-cell table:style-name="ce98" table:formula="of:=[.G9]*1.02" office:value-type="float" office:value="1310.904" calcext:value-type="float">
            <text:p>1311</text:p>
          </table:table-cell>
          <table:table-cell table:style-name="ce98" table:formula="of:=[.H9]*1.02" office:value-type="float" office:value="1337.12208" calcext:value-type="float">
            <text:p>1337</text:p>
          </table:table-cell>
          <table:table-cell table:style-name="ce98" table:formula="of:=[.I9]*1.02" office:value-type="float" office:value="1363.8645216" calcext:value-type="float">
            <text:p>1364</text:p>
          </table:table-cell>
          <table:table-cell table:style-name="ce98" table:formula="of:=[.J9]*1.02" office:value-type="float" office:value="1391.141812032" calcext:value-type="float">
            <text:p>1391</text:p>
          </table:table-cell>
          <table:table-cell table:style-name="ce98" table:formula="of:=[.K9]*1.02" office:value-type="float" office:value="1418.96464827264" calcext:value-type="float">
            <text:p>1419</text:p>
          </table:table-cell>
          <table:table-cell table:style-name="ce98" table:formula="of:=[.L9]*1.02" office:value-type="float" office:value="1447.34394123809" calcext:value-type="float">
            <text:p>1447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Precio de venta por unidad</text:p>
          </table:table-cell>
          <table:table-cell table:style-name="ce42"/>
          <table:table-cell table:number-columns-repeated="3" table:style-name="ce42" office:value-type="float" office:value="100" calcext:value-type="float">
            <text:p>100</text:p>
          </table:table-cell>
          <table:table-cell table:number-columns-repeated="7" table:style-name="ce42" office:value-type="float" office:value="110" calcext:value-type="float">
            <text:p>110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Ingreso por ventas</text:p>
          </table:table-cell>
          <table:table-cell table:style-name="ce43"/>
          <table:table-cell table:style-name="ce77" table:formula="of:=[.D9]*[.D10]" office:value-type="float" office:value="100000" calcext:value-type="float">
            <text:p><text:s/>100,000 </text:p>
          </table:table-cell>
          <table:table-cell table:style-name="ce77" table:formula="of:=[.E9]*[.E10]" office:value-type="float" office:value="120000" calcext:value-type="float">
            <text:p><text:s/>120,000 </text:p>
          </table:table-cell>
          <table:table-cell table:style-name="ce77" table:formula="of:=[.F9]*[.F10]" office:value-type="float" office:value="126000" calcext:value-type="float">
            <text:p><text:s/>126,000 </text:p>
          </table:table-cell>
          <table:table-cell table:style-name="ce77" table:formula="of:=[.G9]*[.G10]" office:value-type="float" office:value="141372" calcext:value-type="float">
            <text:p><text:s/>141,372 </text:p>
          </table:table-cell>
          <table:table-cell table:style-name="ce77" table:formula="of:=[.H9]*[.H10]" office:value-type="float" office:value="144199.44" calcext:value-type="float">
            <text:p><text:s/>144,199 </text:p>
          </table:table-cell>
          <table:table-cell table:style-name="ce77" table:formula="of:=[.I9]*[.I10]" office:value-type="float" office:value="147083.4288" calcext:value-type="float">
            <text:p><text:s/>147,083 </text:p>
          </table:table-cell>
          <table:table-cell table:style-name="ce77" table:formula="of:=[.J9]*[.J10]" office:value-type="float" office:value="150025.097376" calcext:value-type="float">
            <text:p><text:s/>150,025 </text:p>
          </table:table-cell>
          <table:table-cell table:style-name="ce77" table:formula="of:=[.K9]*[.K10]" office:value-type="float" office:value="153025.59932352" calcext:value-type="float">
            <text:p><text:s/>153,026 </text:p>
          </table:table-cell>
          <table:table-cell table:style-name="ce77" table:formula="of:=[.L9]*[.L10]" office:value-type="float" office:value="156086.11130999" calcext:value-type="float">
            <text:p><text:s/>156,086 </text:p>
          </table:table-cell>
          <table:table-cell table:style-name="ce77" table:formula="of:=[.M9]*[.M10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9"/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Presupuesto de Inversion</text:p>
          </table:table-cell>
          <table:table-cell table:number-columns-repeated="16382"/>
        </table:table-row>
        <table:table-row table:style-name="ro3">
          <table:table-cell/>
          <table:table-cell table:style-name="ce11" office:value-type="string" calcext:value-type="string">
            <text:p>Activos</text:p>
          </table:table-cell>
          <table:table-cell table:style-name="ce11" office:value-type="string" calcext:value-type="string">
            <text:p>Año 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Adquisicon de terrenos</text:p>
          </table:table-cell>
          <table:table-cell table:style-name="ce44" office:value-type="float" office:value="80000" calcext:value-type="float">
            <text:p><text:s/>80,000 </text:p>
          </table:table-cell>
          <table:table-cell table:style-name="ce78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Construccion de edificios</text:p>
          </table:table-cell>
          <table:table-cell table:style-name="ce44" office:value-type="float" office:value="200000" calcext:value-type="float">
            <text:p><text:s/>200,000 </text:p>
          </table:table-cell>
          <table:table-cell table:style-name="ce78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Maquinaria</text:p>
          </table:table-cell>
          <table:table-cell table:style-name="ce44" office:value-type="float" office:value="100000" calcext:value-type="float">
            <text:p><text:s/>100,000 </text:p>
          </table:table-cell>
          <table:table-cell table:style-name="ce79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inversion Fija</text:p>
          </table:table-cell>
          <table:table-cell table:style-name="ce45" table:formula="of:=SUM([.C15:.C17])" office:value-type="float" office:value="380000" calcext:value-type="float">
            <text:p><text:s/>380,00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Capital de trabajo</text:p>
          </table:table-cell>
          <table:table-cell table:style-name="ce44" table:formula="of:=-[.C69]" office:value-type="float" office:value="25000" calcext:value-type="float">
            <text:p><text:s/>25,000 </text:p>
          </table:table-cell>
          <table:table-cell table:style-name="ce80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Capital de Trabajo</text:p>
          </table:table-cell>
          <table:table-cell table:style-name="ce45" table:formula="of:=[.C19]" office:value-type="float" office:value="25000" calcext:value-type="float">
            <text:p><text:s/>25,000 </text:p>
          </table:table-cell>
          <table:table-cell table:style-name="ce81"/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>
            <text:p>Total inversion </text:p>
          </table:table-cell>
          <table:table-cell table:style-name="ce46" table:formula="of:=[.C18]+[.C20]" office:value-type="float" office:value="405000" calcext:value-type="float">
            <text:p><text:s/>405,000 </text:p>
          </table:table-cell>
          <table:table-cell table:style-name="ce81"/>
          <table:table-cell table:number-columns-repeated="16380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Tabla de Depreciaciones nominal</text:p>
          </table:table-cell>
          <table:table-cell table:number-columns-repeated="16382"/>
        </table:table-row>
        <table:table-row table:style-name="ro3">
          <table:table-cell/>
          <table:table-cell table:style-name="ce15" office:value-type="string" calcext:value-type="string">
            <text:p>Activos</text:p>
          </table:table-cell>
          <table:table-cell table:style-name="ce82" office:value-type="string" calcext:value-type="string">
            <text:p>Vc</text:p>
          </table:table-cell>
          <table:table-cell table:style-name="ce82" office:value-type="string" calcext:value-type="string">
            <text:p>Vida util</text:p>
          </table:table-cell>
          <table:table-cell table:style-name="ce82" office:value-type="string" calcext:value-type="string">
            <text:p>Dep/año 1-6</text:p>
          </table:table-cell>
          <table:table-cell table:style-name="ce82" office:value-type="string" calcext:value-type="string">
            <text:p>Dep/año 7-10</text:p>
          </table:table-cell>
          <table:table-cell table:style-name="ce82" office:value-type="string" calcext:value-type="string">
            <text:p>Dep Acum</text:p>
          </table:table-cell>
          <table:table-cell table:style-name="ce99" office:value-type="string" calcext:value-type="string">
            <text:p>Valor Cont.</text:p>
          </table:table-cell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dificaciones</text:p>
          </table:table-cell>
          <table:table-cell table:style-name="ce48" table:formula="of:=[.C16]" office:value-type="float" office:value="200000" calcext:value-type="float">
            <text:p><text:s/>200,000 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formula="of:=[.C25]*(1/[.D25])" office:value-type="float" office:value="5000" calcext:value-type="float">
            <text:p>5000</text:p>
          </table:table-cell>
          <table:table-cell table:style-name="ce42" table:formula="of:=[.E25]" office:value-type="float" office:value="5000" calcext:value-type="float">
            <text:p>5000</text:p>
          </table:table-cell>
          <table:table-cell table:style-name="ce42" table:formula="of:=[.F25]*10" office:value-type="float" office:value="50000" calcext:value-type="float">
            <text:p>50000</text:p>
          </table:table-cell>
          <table:table-cell table:style-name="ce100" table:formula="of:=[.C25]-[.G25]" office:value-type="float" office:value="150000" calcext:value-type="float">
            <text:p><text:s/>150,000 </text:p>
          </table:table-cell>
          <table:table-cell table:style-name="ce104"/>
          <table:table-cell table:style-name="ce108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quipos </text:p>
          </table:table-cell>
          <table:table-cell table:style-name="ce48" table:formula="of:=[.C17]" office:value-type="float" office:value="100000" calcext:value-type="float">
            <text:p><text:s/>100,000 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formula="of:=[.C26]*(1/[.D26])" office:value-type="float" office:value="10000" calcext:value-type="float">
            <text:p>1000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F26]*5" office:value-type="float" office:value="0" calcext:value-type="float">
            <text:p>0</text:p>
          </table:table-cell>
          <table:table-cell table:style-name="ce100"/>
          <table:table-cell table:style-name="ce78" table:number-columns-repeated="2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quipos año 6</text:p>
          </table:table-cell>
          <table:table-cell table:style-name="ce49" office:value-type="float" office:value="100000" calcext:value-type="float">
            <text:p><text:s/>100,000 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C27]*(1/[.D27])" office:value-type="float" office:value="10000" calcext:value-type="float">
            <text:p>10000</text:p>
          </table:table-cell>
          <table:table-cell table:style-name="ce42" table:formula="of:=[.F27]*4" office:value-type="float" office:value="40000" calcext:value-type="float">
            <text:p>40000</text:p>
          </table:table-cell>
          <table:table-cell table:style-name="ce100" table:formula="of:=[.C27]-[.G27]" office:value-type="float" office:value="60000" calcext:value-type="float">
            <text:p><text:s/>60,000 </text:p>
          </table:table-cell>
          <table:table-cell table:style-name="ce104"/>
          <table:table-cell table:style-name="ce108"/>
          <table:table-cell table:number-columns-repeated="16374"/>
        </table:table-row>
        <table:table-row table:style-name="ro3">
          <table:table-cell/>
          <table:table-cell table:style-name="ce17" office:value-type="string" calcext:value-type="string">
            <text:p>TOTAL</text:p>
          </table:table-cell>
          <table:table-cell table:style-name="ce43" table:number-columns-repeated="2"/>
          <table:table-cell table:style-name="ce97" table:formula="of:=SUM([.E25:.E27])" office:value-type="float" office:value="15000" calcext:value-type="float">
            <text:p>15000</text:p>
          </table:table-cell>
          <table:table-cell table:style-name="ce97" table:formula="of:=SUM([.F25:.F27])" office:value-type="float" office:value="15000" calcext:value-type="float">
            <text:p>15000</text:p>
          </table:table-cell>
          <table:table-cell table:style-name="ce43" table:formula="of:=SUM([.G25:.G27])" office:value-type="float" office:value="90000" calcext:value-type="float">
            <text:p>90000</text:p>
          </table:table-cell>
          <table:table-cell table:style-name="ce101" table:formula="of:=SUM([.H25:.H27])" office:value-type="float" office:value="210000" calcext:value-type="float">
            <text:p>210000</text:p>
          </table:table-cell>
          <table:table-cell table:style-name="ce10" table:number-columns-repeated="2"/>
          <table:table-cell table:number-columns-repeated="16374"/>
        </table:table-row>
        <table:table-row table:style-name="ro3" table:number-rows-repeated="2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18" office:value-type="string" calcext:value-type="string" table:number-columns-spanned="7" table:number-rows-spanned="1">
            <text:p>ESTADO DE RESULTADOS</text:p>
          </table:table-cell>
          <table:covered-table-cell table:number-columns-repeated="6" table:style-name="ce50"/>
          <table:table-cell table:number-columns-repeated="16376"/>
        </table:table-row>
        <table:table-row table:style-name="ro3">
          <table:table-cell/>
          <table:table-cell table:style-name="ce19" office:value-type="string" calcext:value-type="string" table:number-columns-spanned="1" table:number-rows-spanned="2">
            <text:p>RUBRO</text:p>
          </table:table-cell>
          <table:table-cell table:style-name="ce39" office:value-type="string" calcext:value-type="string" table:number-columns-spanned="11" table:number-rows-spanned="1">
            <text:p>PERIODO</text:p>
          </table:table-cell>
          <table:covered-table-cell table:number-columns-repeated="9" table:style-name="ce47"/>
          <table:covered-table-cell table:style-name="ce39"/>
          <table:table-cell table:number-columns-repeated="16371"/>
        </table:table-row>
        <table:table-row table:style-name="ro3">
          <table:table-cell/>
          <table:covered-table-cell table:style-name="ce17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D33]+1" office:value-type="float" office:value="2" calcext:value-type="float">
            <text:p>2</text:p>
          </table:table-cell>
          <table:table-cell table:style-name="ce40" table:formula="of:=[.E33]+1" office:value-type="float" office:value="3" calcext:value-type="float">
            <text:p>3</text:p>
          </table:table-cell>
          <table:table-cell table:style-name="ce40" table:formula="of:=[.F33]+1" office:value-type="float" office:value="4" calcext:value-type="float">
            <text:p>4</text:p>
          </table:table-cell>
          <table:table-cell table:style-name="ce40" table:formula="of:=[.G33]+1" office:value-type="float" office:value="5" calcext:value-type="float">
            <text:p>5</text:p>
          </table:table-cell>
          <table:table-cell table:style-name="ce40" table:formula="of:=[.H33]+1" office:value-type="float" office:value="6" calcext:value-type="float">
            <text:p>6</text:p>
          </table:table-cell>
          <table:table-cell table:style-name="ce40" table:formula="of:=[.I33]+1" office:value-type="float" office:value="7" calcext:value-type="float">
            <text:p>7</text:p>
          </table:table-cell>
          <table:table-cell table:style-name="ce40" table:formula="of:=[.J33]+1" office:value-type="float" office:value="8" calcext:value-type="float">
            <text:p>8</text:p>
          </table:table-cell>
          <table:table-cell table:style-name="ce40" table:formula="of:=[.K33]+1" office:value-type="float" office:value="9" calcext:value-type="float">
            <text:p>9</text:p>
          </table:table-cell>
          <table:table-cell table:style-name="ce116" table:formula="of:=[.L33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20" office:value-type="string" calcext:value-type="string">
            <text:p>Ventas netas</text:p>
          </table:table-cell>
          <table:table-cell table:style-name="ce51"/>
          <table:table-cell table:style-name="ce51" table:formula="of:=[.D11]" office:value-type="float" office:value="100000" calcext:value-type="float">
            <text:p><text:s/>100,000 </text:p>
          </table:table-cell>
          <table:table-cell table:style-name="ce51" table:formula="of:=[.E11]" office:value-type="float" office:value="120000" calcext:value-type="float">
            <text:p><text:s/>120,000 </text:p>
          </table:table-cell>
          <table:table-cell table:style-name="ce51" table:formula="of:=[.F11]" office:value-type="float" office:value="126000" calcext:value-type="float">
            <text:p><text:s/>126,000 </text:p>
          </table:table-cell>
          <table:table-cell table:style-name="ce51" table:formula="of:=[.G11]" office:value-type="float" office:value="141372" calcext:value-type="float">
            <text:p><text:s/>141,372 </text:p>
          </table:table-cell>
          <table:table-cell table:style-name="ce51" table:formula="of:=[.H11]" office:value-type="float" office:value="144199.44" calcext:value-type="float">
            <text:p><text:s/>144,199 </text:p>
          </table:table-cell>
          <table:table-cell table:style-name="ce51" table:formula="of:=[.I11]" office:value-type="float" office:value="147083.4288" calcext:value-type="float">
            <text:p><text:s/>147,083 </text:p>
          </table:table-cell>
          <table:table-cell table:style-name="ce51" table:formula="of:=[.J11]" office:value-type="float" office:value="150025.097376" calcext:value-type="float">
            <text:p><text:s/>150,025 </text:p>
          </table:table-cell>
          <table:table-cell table:style-name="ce51" table:formula="of:=[.K11]" office:value-type="float" office:value="153025.59932352" calcext:value-type="float">
            <text:p><text:s/>153,026 </text:p>
          </table:table-cell>
          <table:table-cell table:style-name="ce51" table:formula="of:=[.L11]" office:value-type="float" office:value="156086.11130999" calcext:value-type="float">
            <text:p><text:s/>156,086 </text:p>
          </table:table-cell>
          <table:table-cell table:style-name="ce117" table:formula="of:=[.M11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variable</text:p>
          </table:table-cell>
          <table:table-cell table:style-name="ce42"/>
          <table:table-cell table:style-name="ce42" table:formula="of:=-[.D9]*30" office:value-type="float" office:value="-30000" calcext:value-type="float">
            <text:p>-30000</text:p>
          </table:table-cell>
          <table:table-cell table:style-name="ce42" table:formula="of:=-[.E9]*30" office:value-type="float" office:value="-36000" calcext:value-type="float">
            <text:p>-36000</text:p>
          </table:table-cell>
          <table:table-cell table:style-name="ce42" table:formula="of:=-[.F9]*30" office:value-type="float" office:value="-37800" calcext:value-type="float">
            <text:p>-37800</text:p>
          </table:table-cell>
          <table:table-cell table:style-name="ce42" table:formula="of:=-[.G9]*30" office:value-type="float" office:value="-38556" calcext:value-type="float">
            <text:p>-38556</text:p>
          </table:table-cell>
          <table:table-cell table:style-name="ce42" table:formula="of:=-[.H9]*30" office:value-type="float" office:value="-39327.12" calcext:value-type="float">
            <text:p>-39327.12</text:p>
          </table:table-cell>
          <table:table-cell table:style-name="ce42" table:formula="of:=-[.I9]*30" office:value-type="float" office:value="-40113.6624" calcext:value-type="float">
            <text:p>-40113.6624</text:p>
          </table:table-cell>
          <table:table-cell table:style-name="ce42" table:formula="of:=-[.J9]*30" office:value-type="float" office:value="-40915.935648" calcext:value-type="float">
            <text:p>-40915.935648</text:p>
          </table:table-cell>
          <table:table-cell table:style-name="ce42" table:formula="of:=-[.K9]*30" office:value-type="float" office:value="-41734.25436096" calcext:value-type="float">
            <text:p>-41734.25436096</text:p>
          </table:table-cell>
          <table:table-cell table:style-name="ce42" table:formula="of:=-[.L9]*30" office:value-type="float" office:value="-42568.9394481792" calcext:value-type="float">
            <text:p>-42568.9394481792</text:p>
          </table:table-cell>
          <table:table-cell table:style-name="ce118" table:formula="of:=-[.M9]*30" office:value-type="float" office:value="-43420.3182371428" calcext:value-type="float">
            <text:p>-43420.3182371428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fijo</text:p>
          </table:table-cell>
          <table:table-cell table:style-name="ce42"/>
          <table:table-cell table:number-columns-repeated="9" table:style-name="ce42" office:value-type="float" office:value="-20000" calcext:value-type="float">
            <text:p>-20000</text:p>
          </table:table-cell>
          <table:table-cell table:style-name="ce118" office:value-type="float" office:value="-20000" calcext:value-type="float">
            <text:p>-20000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Depreciaciones</text:p>
          </table:table-cell>
          <table:table-cell table:style-name="ce42"/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83" table:formula="of:=-[.$E$28]" office:value-type="float" office:value="-15000" calcext:value-type="float">
            <text:p><text:s/>-15,000 </text:p>
          </table:table-cell>
          <table:table-cell table:style-name="ce119" table:formula="of:=-[.$E$28]" office:value-type="float" office:value="-15000" calcext:value-type="float">
            <text:p><text:s/>-15,000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Utilidad por venta de Maquinarias</text:p>
          </table:table-cell>
          <table:table-cell table:style-name="ce42"/>
          <table:table-cell table:style-name="ce48"/>
          <table:table-cell table:style-name="ce42" table:number-columns-repeated="3"/>
          <table:table-cell table:style-name="ce48"/>
          <table:table-cell table:style-name="ce105" table:formula="of:=[.C17]*0.5-[.E26]*4" office:value-type="float" office:value="10000" calcext:value-type="float">
            <text:p><text:s/>10,000 </text:p>
          </table:table-cell>
          <table:table-cell table:style-name="ce106" table:number-columns-repeated="3"/>
          <table:table-cell table:style-name="ce120"/>
          <table:table-cell table:number-columns-repeated="16371"/>
        </table:table-row>
        <table:table-row table:style-name="ro3">
          <table:table-cell/>
          <table:table-cell table:style-name="ce21" office:value-type="string" calcext:value-type="string">
            <text:p>Utilidad Imponible</text:p>
          </table:table-cell>
          <table:table-cell table:style-name="ce52"/>
          <table:table-cell table:style-name="ce84" table:formula="of:=SUM([.D34:.D38])" office:value-type="float" office:value="35000" calcext:value-type="float">
            <text:p><text:s/>35,000 </text:p>
          </table:table-cell>
          <table:table-cell table:style-name="ce84" table:formula="of:=SUM([.E34:.E38])" office:value-type="float" office:value="49000" calcext:value-type="float">
            <text:p><text:s/>49,000 </text:p>
          </table:table-cell>
          <table:table-cell table:style-name="ce84" table:formula="of:=SUM([.F34:.F38])" office:value-type="float" office:value="53200" calcext:value-type="float">
            <text:p><text:s/>53,200 </text:p>
          </table:table-cell>
          <table:table-cell table:style-name="ce84" table:formula="of:=SUM([.G34:.G38])" office:value-type="float" office:value="67816" calcext:value-type="float">
            <text:p><text:s/>67,816 </text:p>
          </table:table-cell>
          <table:table-cell table:style-name="ce84" table:formula="of:=SUM([.H34:.H38])" office:value-type="float" office:value="69872.32" calcext:value-type="float">
            <text:p><text:s/>69,872 </text:p>
          </table:table-cell>
          <table:table-cell table:style-name="ce84" table:formula="of:=SUM([.I34:.I38])" office:value-type="float" office:value="81969.7664" calcext:value-type="float">
            <text:p><text:s/>81,970 </text:p>
          </table:table-cell>
          <table:table-cell table:style-name="ce84" table:formula="of:=SUM([.J34:.J38])" office:value-type="float" office:value="74109.161728" calcext:value-type="float">
            <text:p><text:s/>74,109 </text:p>
          </table:table-cell>
          <table:table-cell table:style-name="ce84" table:formula="of:=SUM([.K34:.K38])" office:value-type="float" office:value="76291.34496256" calcext:value-type="float">
            <text:p><text:s/>76,291 </text:p>
          </table:table-cell>
          <table:table-cell table:style-name="ce84" table:formula="of:=SUM([.L34:.L38])" office:value-type="float" office:value="78517.1718618112" calcext:value-type="float">
            <text:p><text:s/>78,517 </text:p>
          </table:table-cell>
          <table:table-cell table:style-name="ce121" table:formula="of:=SUM([.M34:.M38])" office:value-type="float" office:value="80787.5152990475" calcext:value-type="float">
            <text:p><text:s/>80,788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Impuestos</text:p>
          </table:table-cell>
          <table:table-cell table:style-name="ce42"/>
          <table:table-cell table:style-name="ce85" table:formula="of:=-[.D39]*0.17" office:value-type="float" office:value="-5950" calcext:value-type="float">
            <text:p><text:s/>-5,950.0 </text:p>
          </table:table-cell>
          <table:table-cell table:style-name="ce85" table:formula="of:=-[.E39]*0.17" office:value-type="float" office:value="-8330" calcext:value-type="float">
            <text:p><text:s/>-8,330.0 </text:p>
          </table:table-cell>
          <table:table-cell table:style-name="ce85" table:formula="of:=-[.F39]*0.17" office:value-type="float" office:value="-9044" calcext:value-type="float">
            <text:p><text:s/>-9,044.0 </text:p>
          </table:table-cell>
          <table:table-cell table:style-name="ce85" table:formula="of:=-[.G39]*0.17" office:value-type="float" office:value="-11528.72" calcext:value-type="float">
            <text:p><text:s/>-11,528.7 </text:p>
          </table:table-cell>
          <table:table-cell table:style-name="ce85" table:formula="of:=-[.H39]*0.17" office:value-type="float" office:value="-11878.2944" calcext:value-type="float">
            <text:p><text:s/>-11,878.3 </text:p>
          </table:table-cell>
          <table:table-cell table:style-name="ce85" table:formula="of:=-[.I39]*0.17" office:value-type="float" office:value="-13934.860288" calcext:value-type="float">
            <text:p><text:s/>-13,934.9 </text:p>
          </table:table-cell>
          <table:table-cell table:style-name="ce85" table:formula="of:=-[.J39]*0.17" office:value-type="float" office:value="-12598.55749376" calcext:value-type="float">
            <text:p><text:s/>-12,598.6 </text:p>
          </table:table-cell>
          <table:table-cell table:style-name="ce85" table:formula="of:=-[.K39]*0.17" office:value-type="float" office:value="-12969.5286436352" calcext:value-type="float">
            <text:p><text:s/>-12,969.5 </text:p>
          </table:table-cell>
          <table:table-cell table:style-name="ce85" table:formula="of:=-[.L39]*0.17" office:value-type="float" office:value="-13347.9192165079" calcext:value-type="float">
            <text:p><text:s/>-13,347.9 </text:p>
          </table:table-cell>
          <table:table-cell table:style-name="ce122" table:formula="of:=-[.M39]*0.17" office:value-type="float" office:value="-13733.8776008381" calcext:value-type="float">
            <text:p><text:s/>-13,733.9 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Utlidad Neta</text:p>
          </table:table-cell>
          <table:table-cell table:style-name="ce43"/>
          <table:table-cell table:style-name="ce86" table:formula="of:=[.D39]+[.D40]" office:value-type="float" office:value="29050" calcext:value-type="float">
            <text:p><text:s/>29,050.0 </text:p>
          </table:table-cell>
          <table:table-cell table:style-name="ce86" table:formula="of:=[.E39]+[.E40]" office:value-type="float" office:value="40670" calcext:value-type="float">
            <text:p><text:s/>40,670.0 </text:p>
          </table:table-cell>
          <table:table-cell table:style-name="ce86" table:formula="of:=[.F39]+[.F40]" office:value-type="float" office:value="44156" calcext:value-type="float">
            <text:p><text:s/>44,156.0 </text:p>
          </table:table-cell>
          <table:table-cell table:style-name="ce86" table:formula="of:=[.G39]+[.G40]" office:value-type="float" office:value="56287.28" calcext:value-type="float">
            <text:p><text:s/>56,287.3 </text:p>
          </table:table-cell>
          <table:table-cell table:style-name="ce86" table:formula="of:=[.H39]+[.H40]" office:value-type="float" office:value="57994.0256" calcext:value-type="float">
            <text:p><text:s/>57,994.0 </text:p>
          </table:table-cell>
          <table:table-cell table:style-name="ce86" table:formula="of:=[.I39]+[.I40]" office:value-type="float" office:value="68034.906112" calcext:value-type="float">
            <text:p><text:s/>68,034.9 </text:p>
          </table:table-cell>
          <table:table-cell table:style-name="ce86" table:formula="of:=[.J39]+[.J40]" office:value-type="float" office:value="61510.60423424" calcext:value-type="float">
            <text:p><text:s/>61,510.6 </text:p>
          </table:table-cell>
          <table:table-cell table:style-name="ce86" table:formula="of:=[.K39]+[.K40]" office:value-type="float" office:value="63321.8163189248" calcext:value-type="float">
            <text:p><text:s/>63,321.8 </text:p>
          </table:table-cell>
          <table:table-cell table:style-name="ce86" table:formula="of:=[.L39]+[.L40]" office:value-type="float" office:value="65169.2526453033" calcext:value-type="float">
            <text:p><text:s/>65,169.3 </text:p>
          </table:table-cell>
          <table:table-cell table:style-name="ce123" table:formula="of:=[.M39]+[.M40]" office:value-type="float" office:value="67053.6376982094" calcext:value-type="float">
            <text:p><text:s/>67,053.6 </text:p>
          </table:table-cell>
          <table:table-cell table:number-columns-repeated="16371"/>
        </table:table-row>
        <table:table-row table:style-name="ro3" table:number-rows-repeated="3">
          <table:table-cell table:number-columns-repeated="2"/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B. FLUJO DE CAJA FINANCIERO</text:p>
          </table:table-cell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 table:number-columns-repeated="2"/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AMORTIZACION DE LA DEUDA</text:p>
          </table:table-cell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 table:number-columns-repeated="2"/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Monto del prestamo</text:p>
          </table:table-cell>
          <table:table-cell table:style-name="ce53" table:formula="of:=[.C18]*0.6" office:value-type="currency" office:currency="S/." office:value="228000" calcext:value-type="currency">
            <text:p><text:s/>S/. 228,000 </text:p>
          </table:table-cell>
          <table:table-cell table:style-name="ce88"/>
          <table:table-cell table:style-name="ce87" table:number-columns-repeated="4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TEA</text:p>
          </table:table-cell>
          <table:table-cell table:style-name="ce54" office:value-type="percentage" office:value="0.09" calcext:value-type="percentage">
            <text:p>9 %</text:p>
          </table:table-cell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n</text:p>
          </table:table-cell>
          <table:table-cell table:style-name="ce10" office:value-type="float" office:value="8" calcext:value-type="float">
            <text:p>8</text:p>
          </table:table-cell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PAGO</text:p>
          </table:table-cell>
          <table:table-cell table:style-name="ce55" table:formula="of:=-PMT([.C50];[.C51];[.C49])" office:value-type="float" office:value="41193.7581469492" calcext:value-type="float">
            <text:p>S/. 41,194</text:p>
          </table:table-cell>
          <table:table-cell table:style-name="ce87" table:number-columns-repeated="5"/>
          <table:table-cell table:number-columns-repeated="16376"/>
        </table:table-row>
        <table:table-row table:style-name="ro3">
          <table:table-cell table:number-columns-repeated="2"/>
          <table:table-cell table:style-name="ce55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ERIODO</text:p>
          </table:table-cell>
          <table:table-cell table:style-name="ce39" office:value-type="string" calcext:value-type="string" table:number-columns-spanned="9" table:number-rows-spanned="1">
            <text:p>PERIODO</text:p>
          </table:table-cell>
          <table:covered-table-cell table:number-columns-repeated="7" table:style-name="ce47"/>
          <table:covered-table-cell table:style-name="ce39"/>
          <table:table-cell table:number-columns-repeated="16373"/>
        </table:table-row>
        <table:table-row table:style-name="ro3">
          <table:table-cell/>
          <table:covered-table-cell table:style-name="ce5"/>
          <table:table-cell table:style-name="ce40" office:value-type="float" office:value="0" calcext:value-type="float">
            <text:p>0</text:p>
          </table:table-cell>
          <table:table-cell table:style-name="ce89" office:value-type="float" office:value="1" calcext:value-type="float">
            <text:p><text:s/>1.0 </text:p>
          </table:table-cell>
          <table:table-cell table:style-name="ce89" table:formula="of:=[.D55]+1" office:value-type="float" office:value="2" calcext:value-type="float">
            <text:p><text:s/>2.0 </text:p>
          </table:table-cell>
          <table:table-cell table:style-name="ce89" table:formula="of:=[.E55]+1" office:value-type="float" office:value="3" calcext:value-type="float">
            <text:p><text:s/>3.0 </text:p>
          </table:table-cell>
          <table:table-cell table:style-name="ce89" table:formula="of:=[.F55]+1" office:value-type="float" office:value="4" calcext:value-type="float">
            <text:p><text:s/>4.0 </text:p>
          </table:table-cell>
          <table:table-cell table:style-name="ce89" table:formula="of:=[.G55]+1" office:value-type="float" office:value="5" calcext:value-type="float">
            <text:p><text:s/>5.0 </text:p>
          </table:table-cell>
          <table:table-cell table:style-name="ce89" table:formula="of:=[.H55]+1" office:value-type="float" office:value="6" calcext:value-type="float">
            <text:p><text:s/>6.0 </text:p>
          </table:table-cell>
          <table:table-cell table:style-name="ce89" table:formula="of:=[.I55]+1" office:value-type="float" office:value="7" calcext:value-type="float">
            <text:p><text:s/>7.0 </text:p>
          </table:table-cell>
          <table:table-cell table:style-name="ce109" table:formula="of:=[.J55]+1" office:value-type="float" office:value="8" calcext:value-type="float">
            <text:p><text:s/>8.0 </text:p>
          </table:table-cell>
          <table:table-cell table:style-name="ce115" table:number-columns-repeated="3"/>
          <table:table-cell table:number-columns-repeated="16370"/>
        </table:table-row>
        <table:table-row table:style-name="ro3">
          <table:table-cell/>
          <table:table-cell table:style-name="ce22" office:value-type="string" calcext:value-type="string">
            <text:p>Deuda Inicial</text:p>
          </table:table-cell>
          <table:table-cell table:style-name="ce56" table:formula="of:=[.C49]" office:value-type="currency" office:currency="S/." office:value="228000" calcext:value-type="currency">
            <text:p><text:s/>S/. 228,000 </text:p>
          </table:table-cell>
          <table:table-cell table:style-name="ce90" table:formula="of:=[.C60]" office:value-type="float" office:value="228000" calcext:value-type="float">
            <text:p><text:s/>228,000 </text:p>
          </table:table-cell>
          <table:table-cell table:style-name="ce90" table:formula="of:=[.D60]" office:value-type="float" office:value="207326.241853051" calcext:value-type="float">
            <text:p><text:s/>207,326 </text:p>
          </table:table-cell>
          <table:table-cell table:style-name="ce90" table:formula="of:=[.E60]" office:value-type="float" office:value="184791.845472876" calcext:value-type="float">
            <text:p><text:s/>184,792 </text:p>
          </table:table-cell>
          <table:table-cell table:style-name="ce90" table:formula="of:=[.F60]" office:value-type="float" office:value="160229.353418486" calcext:value-type="float">
            <text:p><text:s/>160,229 </text:p>
          </table:table-cell>
          <table:table-cell table:style-name="ce90" table:formula="of:=[.G60]" office:value-type="float" office:value="133456.237079201" calcext:value-type="float">
            <text:p><text:s/>133,456 </text:p>
          </table:table-cell>
          <table:table-cell table:style-name="ce90" table:formula="of:=[.H60]" office:value-type="float" office:value="104273.540269379" calcext:value-type="float">
            <text:p><text:s/>104,274 </text:p>
          </table:table-cell>
          <table:table-cell table:style-name="ce90" table:formula="of:=[.I60]" office:value-type="float" office:value="72464.4007466744" calcext:value-type="float">
            <text:p><text:s/>72,464 </text:p>
          </table:table-cell>
          <table:table-cell table:style-name="ce110" table:formula="of:=[.J60]" office:value-type="float" office:value="37792.4386669259" calcext:value-type="float">
            <text:p><text:s/>37,792 </text:p>
          </table:table-cell>
          <table:table-cell table:number-columns-repeated="16373"/>
        </table:table-row>
        <table:table-row table:style-name="ro3">
          <table:table-cell/>
          <table:table-cell table:style-name="ce23" office:value-type="string" calcext:value-type="string">
            <text:p>Interes</text:p>
          </table:table-cell>
          <table:table-cell table:style-name="ce57" office:value-type="float" office:value="0" calcext:value-type="float">
            <text:p>0</text:p>
          </table:table-cell>
          <table:table-cell table:style-name="ce91" table:formula="of:=[.D56]*[.$C$50]" office:value-type="float" office:value="20520" calcext:value-type="float">
            <text:p><text:s/>20,520.0 </text:p>
          </table:table-cell>
          <table:table-cell table:style-name="ce91" table:formula="of:=[.E56]*[.$C$50]" office:value-type="float" office:value="18659.3617667746" calcext:value-type="float">
            <text:p><text:s/>18,659.4 </text:p>
          </table:table-cell>
          <table:table-cell table:style-name="ce91" table:formula="of:=[.F56]*[.$C$50]" office:value-type="float" office:value="16631.2660925589" calcext:value-type="float">
            <text:p><text:s/>16,631.3 </text:p>
          </table:table-cell>
          <table:table-cell table:style-name="ce91" table:formula="of:=[.G56]*[.$C$50]" office:value-type="float" office:value="14420.6418076637" calcext:value-type="float">
            <text:p><text:s/>14,420.6 </text:p>
          </table:table-cell>
          <table:table-cell table:style-name="ce91" table:formula="of:=[.H56]*[.$C$50]" office:value-type="float" office:value="12011.061337128" calcext:value-type="float">
            <text:p><text:s/>12,011.1 </text:p>
          </table:table-cell>
          <table:table-cell table:style-name="ce91" table:formula="of:=[.I56]*[.$C$50]" office:value-type="float" office:value="9384.61862424415" calcext:value-type="float">
            <text:p><text:s/>9,384.6 </text:p>
          </table:table-cell>
          <table:table-cell table:style-name="ce91" table:formula="of:=[.J56]*[.$C$50]" office:value-type="float" office:value="6521.79606720069" calcext:value-type="float">
            <text:p><text:s/>6,521.8 </text:p>
          </table:table-cell>
          <table:table-cell table:style-name="ce111" table:formula="of:=[.K56]*[.$C$50]" office:value-type="float" office:value="3401.31948002333" calcext:value-type="float">
            <text:p><text:s/>3,401.3 </text:p>
          </table:table-cell>
          <table:table-cell table:number-columns-repeated="16373"/>
        </table:table-row>
        <table:table-row table:style-name="ro3">
          <table:table-cell/>
          <table:table-cell table:style-name="ce23" office:value-type="string" calcext:value-type="string">
            <text:p>Capital</text:p>
          </table:table-cell>
          <table:table-cell table:style-name="ce57" office:value-type="float" office:value="0" calcext:value-type="float">
            <text:p>0</text:p>
          </table:table-cell>
          <table:table-cell table:style-name="ce92" table:formula="of:=[.D59]-[.D57]" office:value-type="float" office:value="20673.7581469492" calcext:value-type="float">
            <text:p><text:s/>20,674 </text:p>
          </table:table-cell>
          <table:table-cell table:style-name="ce92" table:formula="of:=[.E59]-[.E57]" office:value-type="float" office:value="22534.3963801746" calcext:value-type="float">
            <text:p><text:s/>22,534 </text:p>
          </table:table-cell>
          <table:table-cell table:style-name="ce92" table:formula="of:=[.F59]-[.F57]" office:value-type="float" office:value="24562.4920543903" calcext:value-type="float">
            <text:p><text:s/>24,562 </text:p>
          </table:table-cell>
          <table:table-cell table:style-name="ce92" table:formula="of:=[.G59]-[.G57]" office:value-type="float" office:value="26773.1163392854" calcext:value-type="float">
            <text:p><text:s/>26,773 </text:p>
          </table:table-cell>
          <table:table-cell table:style-name="ce92" table:formula="of:=[.H59]-[.H57]" office:value-type="float" office:value="29182.6968098211" calcext:value-type="float">
            <text:p><text:s/>29,183 </text:p>
          </table:table-cell>
          <table:table-cell table:style-name="ce92" table:formula="of:=[.I59]-[.I57]" office:value-type="float" office:value="31809.139522705" calcext:value-type="float">
            <text:p><text:s/>31,809 </text:p>
          </table:table-cell>
          <table:table-cell table:style-name="ce92" table:formula="of:=[.J59]-[.J57]" office:value-type="float" office:value="34671.9620797485" calcext:value-type="float">
            <text:p><text:s/>34,672 </text:p>
          </table:table-cell>
          <table:table-cell table:style-name="ce112" table:formula="of:=[.K59]-[.K57]" office:value-type="float" office:value="37792.4386669258" calcext:value-type="float">
            <text:p><text:s/>37,792 </text:p>
          </table:table-cell>
          <table:table-cell table:number-columns-repeated="16373"/>
        </table:table-row>
        <table:table-row table:style-name="ro3">
          <table:table-cell/>
          <table:table-cell table:style-name="ce23" office:value-type="string" calcext:value-type="string">
            <text:p>Amortizacion de la deuda</text:p>
          </table:table-cell>
          <table:table-cell table:style-name="ce57" office:value-type="float" office:value="0" calcext:value-type="float">
            <text:p>0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93" table:formula="of:=[.$C$52]" office:value-type="float" office:value="41193.7581469492" calcext:value-type="float">
            <text:p><text:s/>41,194 </text:p>
          </table:table-cell>
          <table:table-cell table:style-name="ce113" table:formula="of:=[.$C$52]" office:value-type="float" office:value="41193.7581469492" calcext:value-type="float">
            <text:p><text:s/>41,194 </text:p>
          </table:table-cell>
          <table:table-cell table:number-columns-repeated="16373"/>
        </table:table-row>
        <table:table-row table:style-name="ro3">
          <table:table-cell/>
          <table:table-cell table:style-name="ce24" office:value-type="string" calcext:value-type="string">
            <text:p>Deuda Final</text:p>
          </table:table-cell>
          <table:table-cell table:style-name="ce58" table:formula="of:=[.C56]-[.C58]" office:value-type="currency" office:currency="S/." office:value="228000" calcext:value-type="currency">
            <text:p><text:s/>S/. 228,000 </text:p>
          </table:table-cell>
          <table:table-cell table:style-name="ce58" table:formula="of:=[.D56]-[.D58]" office:value-type="currency" office:currency="S/." office:value="207326.241853051" calcext:value-type="currency">
            <text:p><text:s/>S/. 207,326 </text:p>
          </table:table-cell>
          <table:table-cell table:style-name="ce58" table:formula="of:=[.E56]-[.E58]" office:value-type="currency" office:currency="S/." office:value="184791.845472876" calcext:value-type="currency">
            <text:p><text:s/>S/. 184,792 </text:p>
          </table:table-cell>
          <table:table-cell table:style-name="ce58" table:formula="of:=[.F56]-[.F58]" office:value-type="currency" office:currency="S/." office:value="160229.353418486" calcext:value-type="currency">
            <text:p><text:s/>S/. 160,229 </text:p>
          </table:table-cell>
          <table:table-cell table:style-name="ce58" table:formula="of:=[.G56]-[.G58]" office:value-type="currency" office:currency="S/." office:value="133456.237079201" calcext:value-type="currency">
            <text:p><text:s/>S/. 133,456 </text:p>
          </table:table-cell>
          <table:table-cell table:style-name="ce58" table:formula="of:=[.H56]-[.H58]" office:value-type="currency" office:currency="S/." office:value="104273.540269379" calcext:value-type="currency">
            <text:p><text:s/>S/. 104,274 </text:p>
          </table:table-cell>
          <table:table-cell table:style-name="ce58" table:formula="of:=[.I56]-[.I58]" office:value-type="currency" office:currency="S/." office:value="72464.4007466744" calcext:value-type="currency">
            <text:p><text:s/>S/. 72,464 </text:p>
          </table:table-cell>
          <table:table-cell table:style-name="ce58" table:formula="of:=[.J56]-[.J58]" office:value-type="currency" office:currency="S/." office:value="37792.4386669259" calcext:value-type="currency">
            <text:p><text:s/>S/. 37,792 </text:p>
          </table:table-cell>
          <table:table-cell table:style-name="ce114" table:formula="of:=[.K56]-[.K58]" office:value-type="currency" office:currency="S/." office:value="0" calcext:value-type="currency">
            <text:p><text:s/>S/. - <text:s text:c="2"/>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10"/>
          <table:table-cell table:style-name="ce87" table:number-columns-repeated="5"/>
          <table:table-cell table:number-columns-repeated="16376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4">
          <table:table-cell/>
          <table:table-cell table:style-name="ce25" office:value-type="string" calcext:value-type="string" table:number-columns-spanned="12" table:number-rows-spanned="1">
            <text:p>FLUJOS DE CAJA ECONOMICO Y FINANCIERO</text:p>
          </table:table-cell>
          <table:covered-table-cell table:number-columns-repeated="11" table:style-name="ce59"/>
          <table:table-cell table:number-columns-repeated="1637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26" office:value-type="string" calcext:value-type="string" table:number-columns-spanned="1" table:number-rows-spanned="2">
            <text:p>RUBROS</text:p>
          </table:table-cell>
          <table:table-cell table:style-name="ce60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94"/>
          <table:covered-table-cell table:style-name="ce124"/>
          <table:table-cell table:number-columns-repeated="16371"/>
        </table:table-row>
        <table:table-row table:style-name="ro3">
          <table:table-cell/>
          <table:covered-table-cell table:style-name="ce27"/>
          <table:table-cell table:style-name="ce40" office:value-type="float" office:value="0" calcext:value-type="float">
            <text:p>0</text:p>
          </table:table-cell>
          <table:table-cell table:style-name="ce40" table:formula="of:=[.C66]+1" office:value-type="float" office:value="1" calcext:value-type="float">
            <text:p>1</text:p>
          </table:table-cell>
          <table:table-cell table:style-name="ce40" table:formula="of:=[.D66]+1" office:value-type="float" office:value="2" calcext:value-type="float">
            <text:p>2</text:p>
          </table:table-cell>
          <table:table-cell table:style-name="ce40" table:formula="of:=[.E66]+1" office:value-type="float" office:value="3" calcext:value-type="float">
            <text:p>3</text:p>
          </table:table-cell>
          <table:table-cell table:style-name="ce40" table:formula="of:=[.F66]+1" office:value-type="float" office:value="4" calcext:value-type="float">
            <text:p>4</text:p>
          </table:table-cell>
          <table:table-cell table:style-name="ce40" table:formula="of:=[.G66]+1" office:value-type="float" office:value="5" calcext:value-type="float">
            <text:p>5</text:p>
          </table:table-cell>
          <table:table-cell table:style-name="ce40" table:formula="of:=[.H66]+1" office:value-type="float" office:value="6" calcext:value-type="float">
            <text:p>6</text:p>
          </table:table-cell>
          <table:table-cell table:style-name="ce40" table:formula="of:=[.I66]+1" office:value-type="float" office:value="7" calcext:value-type="float">
            <text:p>7</text:p>
          </table:table-cell>
          <table:table-cell table:style-name="ce40" table:formula="of:=[.J66]+1" office:value-type="float" office:value="8" calcext:value-type="float">
            <text:p>8</text:p>
          </table:table-cell>
          <table:table-cell table:style-name="ce40" table:formula="of:=[.K66]+1" office:value-type="float" office:value="9" calcext:value-type="float">
            <text:p>9</text:p>
          </table:table-cell>
          <table:table-cell table:style-name="ce116" table:formula="of:=[.L66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28" office:value-type="string" calcext:value-type="string" table:number-columns-spanned="12" table:number-rows-spanned="1">
            <text:p>Inversiones y Liquidación</text:p>
          </table:table-cell>
          <table:covered-table-cell table:number-columns-repeated="10" table:style-name="ce61"/>
          <table:covered-table-cell table:style-name="ce125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Activo Fijo (-)</text:p>
          </table:table-cell>
          <table:table-cell table:style-name="ce62" table:formula="of:=-[.C18]" office:value-type="float" office:value="-380000" calcext:value-type="float">
            <text:p>-380,000</text:p>
          </table:table-cell>
          <table:table-cell table:style-name="ce62" table:number-columns-repeated="5"/>
          <table:table-cell table:style-name="ce48" table:formula="of:=-[.C17]" office:value-type="float" office:value="-100000" calcext:value-type="float">
            <text:p><text:s/>(100,000)</text:p>
          </table:table-cell>
          <table:table-cell table:style-name="ce42" table:number-columns-repeated="3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Capital de Trabajo (-)</text:p>
          </table:table-cell>
          <table:table-cell table:style-name="ce62" table:formula="of:=([.D35]+[.D36])/2" office:value-type="float" office:value="-25000" calcext:value-type="float">
            <text:p>-25,000</text:p>
          </table:table-cell>
          <table:table-cell table:style-name="ce62" table:formula="of:=([.E35]+[.E36])/2-[.C69]" office:value-type="float" office:value="-3000" calcext:value-type="float">
            <text:p>-3,000</text:p>
          </table:table-cell>
          <table:table-cell table:style-name="ce62" table:formula="of:=([.F35]+[.F36])/2-[.D69]-[.C69]" office:value-type="float" office:value="-900" calcext:value-type="float">
            <text:p>-900</text:p>
          </table:table-cell>
          <table:table-cell table:style-name="ce62" table:formula="of:=([.G35]+[.G36])/2-[.E69]-[.D69]-[.C69]" office:value-type="float" office:value="-378" calcext:value-type="float">
            <text:p>-378</text:p>
          </table:table-cell>
          <table:table-cell table:style-name="ce62" table:formula="of:=([.H35]+[.H36])/2-[.F69]-[.E69]-[.D69]-[.C69]" office:value-type="float" office:value="-385.560000000001" calcext:value-type="float">
            <text:p>-386</text:p>
          </table:table-cell>
          <table:table-cell table:style-name="ce62" table:formula="of:=([.I35]+[.I36])/2-[.G69]-[.F69]-[.E69]-[.D69]-[.C69]" office:value-type="float" office:value="-393.271199999999" calcext:value-type="float">
            <text:p>-393</text:p>
          </table:table-cell>
          <table:table-cell table:style-name="ce62" table:formula="of:=([.J35]+[.J36])/2-[.H69]-[.G69]-[.F69]-[.E69]-[.D69]-[.C69]" office:value-type="float" office:value="-401.136624000003" calcext:value-type="float">
            <text:p>-401</text:p>
          </table:table-cell>
          <table:table-cell table:style-name="ce62" table:formula="of:=([.K35]+[.K36])/2-[.I69]-[.H69]-[.G69]-[.F69]-[.E69]-[.D69]-[.C69]" office:value-type="float" office:value="-409.159356479999" calcext:value-type="float">
            <text:p>-409</text:p>
          </table:table-cell>
          <table:table-cell table:style-name="ce62" table:formula="of:=([.L35]+[.L36])/2-[.J69]-[.I69]-[.H69]-[.G69]-[.F69]-[.E69]-[.D69]-[.C69]" office:value-type="float" office:value="-417.342543609604" calcext:value-type="float">
            <text:p>-417</text:p>
          </table:table-cell>
          <table:table-cell table:style-name="ce62" table:formula="of:=([.M35]+[.M36])/2-[.K69]-[.J69]-[.I69]-[.H69]-[.G69]-[.F69]-[.E69]-[.D69]-[.C69]" office:value-type="float" office:value="-425.689394481789" calcext:value-type="float">
            <text:p>-426</text:p>
          </table:table-cell>
          <table:table-cell table:style-name="ce120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Ingresos por venta de maquinaria (+)</text:p>
          </table:table-cell>
          <table:table-cell table:style-name="ce62" table:number-columns-repeated="6"/>
          <table:table-cell table:style-name="ce85" table:formula="of:=[.C17]*0.5" office:value-type="float" office:value="50000" calcext:value-type="float">
            <text:p><text:s/>50,000.0 </text:p>
          </table:table-cell>
          <table:table-cell table:style-name="ce42" table:number-columns-repeated="3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recupero Capital Trabajo (+)</text:p>
          </table:table-cell>
          <table:table-cell table:style-name="ce62" table:number-columns-repeated="6"/>
          <table:table-cell table:style-name="ce42" table:number-columns-repeated="4"/>
          <table:table-cell table:style-name="ce126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recupero de Terreno (+)</text:p>
          </table:table-cell>
          <table:table-cell table:style-name="ce62" table:number-columns-repeated="6"/>
          <table:table-cell table:style-name="ce42" table:number-columns-repeated="4"/>
          <table:table-cell table:style-name="ce100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<text:s/>residual de Activo Fijo (+)</text:p>
          </table:table-cell>
          <table:table-cell table:style-name="ce62" table:number-columns-repeated="6"/>
          <table:table-cell table:style-name="ce42" table:number-columns-repeated="4"/>
          <table:table-cell table:style-name="ce127"/>
          <table:table-cell table:number-columns-repeated="16371"/>
        </table:table-row>
        <table:table-row table:style-name="ro3">
          <table:table-cell/>
          <table:table-cell table:style-name="ce29" office:value-type="string" calcext:value-type="string">
            <text:p>Flujo de Inversiones</text:p>
          </table:table-cell>
          <table:table-cell table:style-name="ce63" table:formula="of:=SUM([.C68:.C73])" office:value-type="float" office:value="-405000" calcext:value-type="float">
            <text:p>-405,000</text:p>
          </table:table-cell>
          <table:table-cell table:style-name="ce63" table:formula="of:=SUM([.D68:.D73])" office:value-type="float" office:value="-3000" calcext:value-type="float">
            <text:p>-3,000</text:p>
          </table:table-cell>
          <table:table-cell table:style-name="ce63" table:formula="of:=SUM([.E68:.E73])" office:value-type="float" office:value="-900" calcext:value-type="float">
            <text:p>-900</text:p>
          </table:table-cell>
          <table:table-cell table:style-name="ce63" table:formula="of:=SUM([.F68:.F73])" office:value-type="float" office:value="-378" calcext:value-type="float">
            <text:p>-378</text:p>
          </table:table-cell>
          <table:table-cell table:style-name="ce63" table:formula="of:=SUM([.G68:.G73])" office:value-type="float" office:value="-385.560000000001" calcext:value-type="float">
            <text:p>-386</text:p>
          </table:table-cell>
          <table:table-cell table:style-name="ce63" table:formula="of:=SUM([.H68:.H73])" office:value-type="float" office:value="-393.271199999999" calcext:value-type="float">
            <text:p>-393</text:p>
          </table:table-cell>
          <table:table-cell table:style-name="ce63" table:formula="of:=SUM([.I68:.I73])" office:value-type="float" office:value="-50401.136624" calcext:value-type="float">
            <text:p>-50,401</text:p>
          </table:table-cell>
          <table:table-cell table:style-name="ce63" table:formula="of:=SUM([.J68:.J73])" office:value-type="float" office:value="-409.159356479999" calcext:value-type="float">
            <text:p>-409</text:p>
          </table:table-cell>
          <table:table-cell table:style-name="ce63" table:formula="of:=SUM([.K68:.K73])" office:value-type="float" office:value="-417.342543609604" calcext:value-type="float">
            <text:p>-417</text:p>
          </table:table-cell>
          <table:table-cell table:style-name="ce63" table:formula="of:=SUM([.L68:.L73])" office:value-type="float" office:value="-425.689394481789" calcext:value-type="float">
            <text:p>-426</text:p>
          </table:table-cell>
          <table:table-cell table:style-name="ce128" table:formula="of:=SUM([.M68:.M73]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table:style-name="ce30" office:value-type="string" calcext:value-type="string" table:number-columns-spanned="7" table:number-rows-spanned="1">
            <text:p>Costos y Gastos Operativos</text:p>
          </table:table-cell>
          <table:covered-table-cell table:number-columns-repeated="5" table:style-name="ce64"/>
          <table:covered-table-cell table:style-name="ce102"/>
          <table:table-cell table:style-name="ce106" table:number-columns-repeated="4"/>
          <table:table-cell table:style-name="ce120"/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Ingresos en efectivo (+)</text:p>
          </table:table-cell>
          <table:table-cell table:style-name="ce65" table:formula="of:=[.C11]" office:value-type="float" office:value="0" calcext:value-type="float">
            <text:p>0</text:p>
          </table:table-cell>
          <table:table-cell table:style-name="ce65" table:formula="of:=[.D11]" office:value-type="float" office:value="100000" calcext:value-type="float">
            <text:p>100,000</text:p>
          </table:table-cell>
          <table:table-cell table:style-name="ce65" table:formula="of:=[.E11]" office:value-type="float" office:value="120000" calcext:value-type="float">
            <text:p>120,000</text:p>
          </table:table-cell>
          <table:table-cell table:style-name="ce65" table:formula="of:=[.F11]" office:value-type="float" office:value="126000" calcext:value-type="float">
            <text:p>126,000</text:p>
          </table:table-cell>
          <table:table-cell table:style-name="ce65" table:formula="of:=[.G11]" office:value-type="float" office:value="141372" calcext:value-type="float">
            <text:p>141,372</text:p>
          </table:table-cell>
          <table:table-cell table:style-name="ce65" table:formula="of:=[.H11]" office:value-type="float" office:value="144199.44" calcext:value-type="float">
            <text:p>144,199</text:p>
          </table:table-cell>
          <table:table-cell table:style-name="ce65" table:formula="of:=[.I11]" office:value-type="float" office:value="147083.4288" calcext:value-type="float">
            <text:p>147,083</text:p>
          </table:table-cell>
          <table:table-cell table:style-name="ce65" table:formula="of:=[.J11]" office:value-type="float" office:value="150025.097376" calcext:value-type="float">
            <text:p>150,025</text:p>
          </table:table-cell>
          <table:table-cell table:style-name="ce65" table:formula="of:=[.K11]" office:value-type="float" office:value="153025.59932352" calcext:value-type="float">
            <text:p>153,026</text:p>
          </table:table-cell>
          <table:table-cell table:style-name="ce65" table:formula="of:=[.L11]" office:value-type="float" office:value="156086.11130999" calcext:value-type="float">
            <text:p>156,086</text:p>
          </table:table-cell>
          <table:table-cell table:style-name="ce129" table:formula="of:=[.M11]" office:value-type="float" office:value="159207.83353619" calcext:value-type="float">
            <text:p>159,208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Costos Fijos</text:p>
          </table:table-cell>
          <table:table-cell table:style-name="ce66"/>
          <table:table-cell table:style-name="ce62" table:formula="of:=[.D36]" office:value-type="float" office:value="-20000" calcext:value-type="float">
            <text:p>-20,000</text:p>
          </table:table-cell>
          <table:table-cell table:style-name="ce62" table:formula="of:=[.E36]" office:value-type="float" office:value="-20000" calcext:value-type="float">
            <text:p>-20,000</text:p>
          </table:table-cell>
          <table:table-cell table:style-name="ce62" table:formula="of:=[.F36]" office:value-type="float" office:value="-20000" calcext:value-type="float">
            <text:p>-20,000</text:p>
          </table:table-cell>
          <table:table-cell table:style-name="ce62" table:formula="of:=[.G36]" office:value-type="float" office:value="-20000" calcext:value-type="float">
            <text:p>-20,000</text:p>
          </table:table-cell>
          <table:table-cell table:style-name="ce62" table:formula="of:=[.H36]" office:value-type="float" office:value="-20000" calcext:value-type="float">
            <text:p>-20,000</text:p>
          </table:table-cell>
          <table:table-cell table:style-name="ce62" table:formula="of:=[.I36]" office:value-type="float" office:value="-20000" calcext:value-type="float">
            <text:p>-20,000</text:p>
          </table:table-cell>
          <table:table-cell table:style-name="ce62" table:formula="of:=[.J36]" office:value-type="float" office:value="-20000" calcext:value-type="float">
            <text:p>-20,000</text:p>
          </table:table-cell>
          <table:table-cell table:style-name="ce62" table:formula="of:=[.K36]" office:value-type="float" office:value="-20000" calcext:value-type="float">
            <text:p>-20,000</text:p>
          </table:table-cell>
          <table:table-cell table:style-name="ce62" table:formula="of:=[.L36]" office:value-type="float" office:value="-20000" calcext:value-type="float">
            <text:p>-20,000</text:p>
          </table:table-cell>
          <table:table-cell table:style-name="ce130" table:formula="of:=[.M36]" office:value-type="float" office:value="-20000" calcext:value-type="float">
            <text:p>-20,000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Costos Variables</text:p>
          </table:table-cell>
          <table:table-cell table:style-name="ce66"/>
          <table:table-cell table:style-name="ce62" table:formula="of:=[.D35]" office:value-type="float" office:value="-30000" calcext:value-type="float">
            <text:p>-30,000</text:p>
          </table:table-cell>
          <table:table-cell table:style-name="ce62" table:formula="of:=[.E35]" office:value-type="float" office:value="-36000" calcext:value-type="float">
            <text:p>-36,000</text:p>
          </table:table-cell>
          <table:table-cell table:style-name="ce62" table:formula="of:=[.F35]" office:value-type="float" office:value="-37800" calcext:value-type="float">
            <text:p>-37,800</text:p>
          </table:table-cell>
          <table:table-cell table:style-name="ce62" table:formula="of:=[.G35]" office:value-type="float" office:value="-38556" calcext:value-type="float">
            <text:p>-38,556</text:p>
          </table:table-cell>
          <table:table-cell table:style-name="ce62" table:formula="of:=[.H35]" office:value-type="float" office:value="-39327.12" calcext:value-type="float">
            <text:p>-39,327</text:p>
          </table:table-cell>
          <table:table-cell table:style-name="ce62" table:formula="of:=[.I35]" office:value-type="float" office:value="-40113.6624" calcext:value-type="float">
            <text:p>-40,114</text:p>
          </table:table-cell>
          <table:table-cell table:style-name="ce62" table:formula="of:=[.J35]" office:value-type="float" office:value="-40915.935648" calcext:value-type="float">
            <text:p>-40,916</text:p>
          </table:table-cell>
          <table:table-cell table:style-name="ce62" table:formula="of:=[.K35]" office:value-type="float" office:value="-41734.25436096" calcext:value-type="float">
            <text:p>-41,734</text:p>
          </table:table-cell>
          <table:table-cell table:style-name="ce62" table:formula="of:=[.L35]" office:value-type="float" office:value="-42568.9394481792" calcext:value-type="float">
            <text:p>-42,569</text:p>
          </table:table-cell>
          <table:table-cell table:style-name="ce130" table:formula="of:=[.M35]" office:value-type="float" office:value="-43420.3182371428" calcext:value-type="float">
            <text:p>-43,420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Impuestos y Tributos (-)</text:p>
          </table:table-cell>
          <table:table-cell table:style-name="ce67"/>
          <table:table-cell table:style-name="ce95" table:formula="of:=[.D40]" office:value-type="float" office:value="-5950" calcext:value-type="float">
            <text:p>-5,950</text:p>
          </table:table-cell>
          <table:table-cell table:style-name="ce95" table:formula="of:=[.E40]" office:value-type="float" office:value="-8330" calcext:value-type="float">
            <text:p>-8,330</text:p>
          </table:table-cell>
          <table:table-cell table:style-name="ce95" table:formula="of:=[.F40]" office:value-type="float" office:value="-9044" calcext:value-type="float">
            <text:p>-9,044</text:p>
          </table:table-cell>
          <table:table-cell table:style-name="ce95" table:formula="of:=[.G40]" office:value-type="float" office:value="-11528.72" calcext:value-type="float">
            <text:p>-11,529</text:p>
          </table:table-cell>
          <table:table-cell table:style-name="ce95" table:formula="of:=[.H40]" office:value-type="float" office:value="-11878.2944" calcext:value-type="float">
            <text:p>-11,878</text:p>
          </table:table-cell>
          <table:table-cell table:style-name="ce95" table:formula="of:=[.I40]" office:value-type="float" office:value="-13934.860288" calcext:value-type="float">
            <text:p>-13,935</text:p>
          </table:table-cell>
          <table:table-cell table:style-name="ce95" table:formula="of:=[.J40]" office:value-type="float" office:value="-12598.55749376" calcext:value-type="float">
            <text:p>-12,599</text:p>
          </table:table-cell>
          <table:table-cell table:style-name="ce95" table:formula="of:=[.K40]" office:value-type="float" office:value="-12969.5286436352" calcext:value-type="float">
            <text:p>-12,970</text:p>
          </table:table-cell>
          <table:table-cell table:style-name="ce95" table:formula="of:=[.L40]" office:value-type="float" office:value="-13347.9192165079" calcext:value-type="float">
            <text:p>-13,348</text:p>
          </table:table-cell>
          <table:table-cell table:style-name="ce131" table:formula="of:=[.M40]" office:value-type="float" office:value="-13733.8776008381" calcext:value-type="float">
            <text:p>-13,734</text:p>
          </table:table-cell>
          <table:table-cell table:number-columns-repeated="16371"/>
        </table:table-row>
        <table:table-row table:style-name="ro3">
          <table:table-cell/>
          <table:table-cell table:style-name="ce32" office:value-type="string" calcext:value-type="string">
            <text:p>Flujo de Caja Operativo</text:p>
          </table:table-cell>
          <table:table-cell table:style-name="ce68"/>
          <table:table-cell table:style-name="ce68" table:formula="of:=SUM([.D76:.D79])" office:value-type="float" office:value="44050" calcext:value-type="float">
            <text:p>44,050</text:p>
          </table:table-cell>
          <table:table-cell table:style-name="ce68" table:formula="of:=SUM([.E76:.E79])" office:value-type="float" office:value="55670" calcext:value-type="float">
            <text:p>55,670</text:p>
          </table:table-cell>
          <table:table-cell table:style-name="ce68" table:formula="of:=SUM([.F76:.F79])" office:value-type="float" office:value="59156" calcext:value-type="float">
            <text:p>59,156</text:p>
          </table:table-cell>
          <table:table-cell table:style-name="ce68" table:formula="of:=SUM([.G76:.G79])" office:value-type="float" office:value="71287.28" calcext:value-type="float">
            <text:p>71,287</text:p>
          </table:table-cell>
          <table:table-cell table:style-name="ce68" table:formula="of:=SUM([.H76:.H79])" office:value-type="float" office:value="72994.0256" calcext:value-type="float">
            <text:p>72,994</text:p>
          </table:table-cell>
          <table:table-cell table:style-name="ce68" table:formula="of:=SUM([.I76:.I79])" office:value-type="float" office:value="73034.906112" calcext:value-type="float">
            <text:p>73,035</text:p>
          </table:table-cell>
          <table:table-cell table:style-name="ce68" table:formula="of:=SUM([.J76:.J79])" office:value-type="float" office:value="76510.60423424" calcext:value-type="float">
            <text:p>76,511</text:p>
          </table:table-cell>
          <table:table-cell table:style-name="ce68" table:formula="of:=SUM([.K76:.K79])" office:value-type="float" office:value="78321.8163189248" calcext:value-type="float">
            <text:p>78,322</text:p>
          </table:table-cell>
          <table:table-cell table:style-name="ce68" table:formula="of:=SUM([.L76:.L79])" office:value-type="float" office:value="80169.2526453033" calcext:value-type="float">
            <text:p>80,169</text:p>
          </table:table-cell>
          <table:table-cell table:style-name="ce132" table:formula="of:=SUM([.M76:.M79])" office:value-type="float" office:value="82053.6376982094" calcext:value-type="float">
            <text:p>82,054</text:p>
          </table:table-cell>
          <table:table-cell table:number-columns-repeated="16371"/>
        </table:table-row>
        <table:table-row table:style-name="ro3">
          <table:table-cell/>
          <table:table-cell table:style-name="ce144" office:value-type="string" calcext:value-type="string">
            <text:p>Flujo de Caja Económico (FCE)</text:p>
          </table:table-cell>
          <table:table-cell table:style-name="ce148" table:formula="of:=[.C74]+[.C80]" office:value-type="float" office:value="-405000" calcext:value-type="float">
            <text:p>-405,000</text:p>
          </table:table-cell>
          <table:table-cell table:style-name="ce148" table:formula="of:=[.D74]+[.D80]" office:value-type="float" office:value="41050" calcext:value-type="float">
            <text:p>41,050</text:p>
          </table:table-cell>
          <table:table-cell table:style-name="ce148" table:formula="of:=[.E74]+[.E80]" office:value-type="float" office:value="54770" calcext:value-type="float">
            <text:p>54,770</text:p>
          </table:table-cell>
          <table:table-cell table:style-name="ce148" table:formula="of:=[.F74]+[.F80]" office:value-type="float" office:value="58778" calcext:value-type="float">
            <text:p>58,778</text:p>
          </table:table-cell>
          <table:table-cell table:style-name="ce148" table:formula="of:=[.G74]+[.G80]" office:value-type="float" office:value="70901.72" calcext:value-type="float">
            <text:p>70,902</text:p>
          </table:table-cell>
          <table:table-cell table:style-name="ce148" table:formula="of:=[.H74]+[.H80]" office:value-type="float" office:value="72600.7544" calcext:value-type="float">
            <text:p>72,601</text:p>
          </table:table-cell>
          <table:table-cell table:style-name="ce148" table:formula="of:=[.I74]+[.I80]" office:value-type="float" office:value="22633.769488" calcext:value-type="float">
            <text:p>22,634</text:p>
          </table:table-cell>
          <table:table-cell table:style-name="ce148" table:formula="of:=[.J74]+[.J80]" office:value-type="float" office:value="76101.44487776" calcext:value-type="float">
            <text:p>76,101</text:p>
          </table:table-cell>
          <table:table-cell table:style-name="ce148" table:formula="of:=[.K74]+[.K80]" office:value-type="float" office:value="77904.4737753152" calcext:value-type="float">
            <text:p>77,904</text:p>
          </table:table-cell>
          <table:table-cell table:style-name="ce148" table:formula="of:=[.L74]+[.L80]" office:value-type="float" office:value="79743.5632508215" calcext:value-type="float">
            <text:p>79,744</text:p>
          </table:table-cell>
          <table:table-cell table:style-name="ce155" table:formula="of:=[.M74]+[.M80]" office:value-type="float" office:value="82053.6376982094" calcext:value-type="float">
            <text:p>82,054</text:p>
          </table:table-cell>
          <table:table-cell table:number-columns-repeated="16371"/>
        </table:table-row>
        <table:table-row table:style-name="ro3">
          <table:table-cell/>
          <table:table-cell table:style-name="ce34" office:value-type="string" calcext:value-type="string" table:number-columns-spanned="7" table:number-rows-spanned="1">
            <text:p>Financiamiento Neto</text:p>
          </table:table-cell>
          <table:covered-table-cell table:number-columns-repeated="5" table:style-name="ce70"/>
          <table:covered-table-cell table:style-name="ce103"/>
          <table:table-cell table:style-name="ce107" table:number-columns-repeated="4"/>
          <table:table-cell table:style-name="ce134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+ Préstamos</text:p>
          </table:table-cell>
          <table:table-cell table:style-name="ce71" table:formula="of:=[.C56]" office:value-type="float" office:value="228000" calcext:value-type="float">
            <text:p>228,000.00</text:p>
          </table:table-cell>
          <table:table-cell table:style-name="ce71" table:number-columns-repeated="5"/>
          <table:table-cell table:style-name="ce42" table:number-columns-repeated="4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- Capital</text:p>
          </table:table-cell>
          <table:table-cell table:style-name="ce71"/>
          <table:table-cell table:style-name="ce71" table:formula="of:=-[.D58]" office:value-type="float" office:value="-20673.7581469492" calcext:value-type="float">
            <text:p>-20,673.76</text:p>
          </table:table-cell>
          <table:table-cell table:style-name="ce71" table:formula="of:=-[.E58]" office:value-type="float" office:value="-22534.3963801746" calcext:value-type="float">
            <text:p>-22,534.40</text:p>
          </table:table-cell>
          <table:table-cell table:style-name="ce71" table:formula="of:=-[.F58]" office:value-type="float" office:value="-24562.4920543903" calcext:value-type="float">
            <text:p>-24,562.49</text:p>
          </table:table-cell>
          <table:table-cell table:style-name="ce71" table:formula="of:=-[.G58]" office:value-type="float" office:value="-26773.1163392854" calcext:value-type="float">
            <text:p>-26,773.12</text:p>
          </table:table-cell>
          <table:table-cell table:style-name="ce71" table:formula="of:=-[.H58]" office:value-type="float" office:value="-29182.6968098211" calcext:value-type="float">
            <text:p>-29,182.70</text:p>
          </table:table-cell>
          <table:table-cell table:style-name="ce71" table:formula="of:=-[.I58]" office:value-type="float" office:value="-31809.139522705" calcext:value-type="float">
            <text:p>-31,809.14</text:p>
          </table:table-cell>
          <table:table-cell table:style-name="ce71" table:formula="of:=-[.J58]" office:value-type="float" office:value="-34671.9620797485" calcext:value-type="float">
            <text:p>-34,671.96</text:p>
          </table:table-cell>
          <table:table-cell table:style-name="ce71" table:formula="of:=-[.K58]" office:value-type="float" office:value="-37792.4386669258" calcext:value-type="float">
            <text:p>-37,792.44</text:p>
          </table:table-cell>
          <table:table-cell table:style-name="ce42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- Intereses</text:p>
          </table:table-cell>
          <table:table-cell table:style-name="ce71"/>
          <table:table-cell table:style-name="ce71" table:formula="of:=-[.D57]" office:value-type="float" office:value="-20520" calcext:value-type="float">
            <text:p>-20,520.00</text:p>
          </table:table-cell>
          <table:table-cell table:style-name="ce71" table:formula="of:=-[.E57]" office:value-type="float" office:value="-18659.3617667746" calcext:value-type="float">
            <text:p>-18,659.36</text:p>
          </table:table-cell>
          <table:table-cell table:style-name="ce71" table:formula="of:=-[.F57]" office:value-type="float" office:value="-16631.2660925589" calcext:value-type="float">
            <text:p>-16,631.27</text:p>
          </table:table-cell>
          <table:table-cell table:style-name="ce71" table:formula="of:=-[.G57]" office:value-type="float" office:value="-14420.6418076637" calcext:value-type="float">
            <text:p>-14,420.64</text:p>
          </table:table-cell>
          <table:table-cell table:style-name="ce71" table:formula="of:=-[.H57]" office:value-type="float" office:value="-12011.061337128" calcext:value-type="float">
            <text:p>-12,011.06</text:p>
          </table:table-cell>
          <table:table-cell table:style-name="ce71" table:formula="of:=-[.I57]" office:value-type="float" office:value="-9384.61862424415" calcext:value-type="float">
            <text:p>-9,384.62</text:p>
          </table:table-cell>
          <table:table-cell table:style-name="ce71" table:formula="of:=-[.J57]" office:value-type="float" office:value="-6521.79606720069" calcext:value-type="float">
            <text:p>-6,521.80</text:p>
          </table:table-cell>
          <table:table-cell table:style-name="ce71" table:formula="of:=-[.K57]" office:value-type="float" office:value="-3401.31948002333" calcext:value-type="float">
            <text:p>-3,401.32</text:p>
          </table:table-cell>
          <table:table-cell table:style-name="ce42"/>
          <table:table-cell table:style-name="ce118"/>
          <table:table-cell table:number-columns-repeated="16371"/>
        </table:table-row>
        <table:table-row table:style-name="ro3">
          <table:table-cell/>
          <table:table-cell table:style-name="ce145" office:value-type="string" calcext:value-type="string">
            <text:p><text:s/>+ Escudo Fiscal o tributario</text:p>
          </table:table-cell>
          <table:table-cell table:style-name="ce149"/>
          <table:table-cell table:style-name="ce152" table:formula="of:=-[.D85]*0.17" office:value-type="float" office:value="3488.4" calcext:value-type="float">
            <text:p>3488.40</text:p>
          </table:table-cell>
          <table:table-cell table:style-name="ce152" table:formula="of:=-[.E85]*0.17" office:value-type="float" office:value="3172.09150035168" calcext:value-type="float">
            <text:p>3172.09</text:p>
          </table:table-cell>
          <table:table-cell table:style-name="ce152" table:formula="of:=-[.F85]*0.17" office:value-type="float" office:value="2827.31523573501" calcext:value-type="float">
            <text:p>2827.32</text:p>
          </table:table-cell>
          <table:table-cell table:style-name="ce152" table:formula="of:=-[.G85]*0.17" office:value-type="float" office:value="2451.50910730283" calcext:value-type="float">
            <text:p>2451.51</text:p>
          </table:table-cell>
          <table:table-cell table:style-name="ce152" table:formula="of:=-[.H85]*0.17" office:value-type="float" office:value="2041.88042731177" calcext:value-type="float">
            <text:p>2041.88</text:p>
          </table:table-cell>
          <table:table-cell table:style-name="ce152" table:formula="of:=-[.I85]*0.17" office:value-type="float" office:value="1595.3851661215" calcext:value-type="float">
            <text:p>1595.39</text:p>
          </table:table-cell>
          <table:table-cell table:style-name="ce152" table:formula="of:=-[.J85]*0.17" office:value-type="float" office:value="1108.70533142412" calcext:value-type="float">
            <text:p>1108.71</text:p>
          </table:table-cell>
          <table:table-cell table:style-name="ce152" table:formula="of:=-[.K85]*0.17" office:value-type="float" office:value="578.224311603966" calcext:value-type="float">
            <text:p>578.22</text:p>
          </table:table-cell>
          <table:table-cell table:style-name="ce153"/>
          <table:table-cell table:style-name="ce156"/>
          <table:table-cell table:number-columns-repeated="16371"/>
        </table:table-row>
        <table:table-row table:style-name="ro3">
          <table:table-cell/>
          <table:table-cell table:style-name="ce146" office:value-type="string" calcext:value-type="string">
            <text:p>Flujo de Caja de Deuda (FCD)</text:p>
          </table:table-cell>
          <table:table-cell table:style-name="ce150" table:formula="of:=SUM([.C83:.C86])" office:value-type="float" office:value="228000" calcext:value-type="float">
            <text:p>228,000</text:p>
          </table:table-cell>
          <table:table-cell table:style-name="ce150" table:formula="of:=SUM([.D83:.D86])" office:value-type="float" office:value="-37705.3581469492" calcext:value-type="float">
            <text:p>-37,705</text:p>
          </table:table-cell>
          <table:table-cell table:style-name="ce150" table:formula="of:=SUM([.E83:.E86])" office:value-type="float" office:value="-38021.6666465975" calcext:value-type="float">
            <text:p>-38,022</text:p>
          </table:table-cell>
          <table:table-cell table:style-name="ce150" table:formula="of:=SUM([.F83:.F86])" office:value-type="float" office:value="-38366.4429112142" calcext:value-type="float">
            <text:p>-38,366</text:p>
          </table:table-cell>
          <table:table-cell table:style-name="ce150" table:formula="of:=SUM([.G83:.G86])" office:value-type="float" office:value="-38742.2490396463" calcext:value-type="float">
            <text:p>-38,742</text:p>
          </table:table-cell>
          <table:table-cell table:style-name="ce150" table:formula="of:=SUM([.H83:.H86])" office:value-type="float" office:value="-39151.8777196374" calcext:value-type="float">
            <text:p>-39,152</text:p>
          </table:table-cell>
          <table:table-cell table:style-name="ce150" table:formula="of:=SUM([.I83:.I86])" office:value-type="float" office:value="-39598.3729808277" calcext:value-type="float">
            <text:p>-39,598</text:p>
          </table:table-cell>
          <table:table-cell table:style-name="ce150" table:formula="of:=SUM([.J83:.J86])" office:value-type="float" office:value="-40085.052815525" calcext:value-type="float">
            <text:p>-40,085</text:p>
          </table:table-cell>
          <table:table-cell table:style-name="ce150" table:formula="of:=SUM([.K83:.K86])" office:value-type="float" office:value="-40615.5338353452" calcext:value-type="float">
            <text:p>-40,616</text:p>
          </table:table-cell>
          <table:table-cell table:style-name="ce154"/>
          <table:table-cell table:style-name="ce157"/>
          <table:table-cell table:number-columns-repeated="16371"/>
        </table:table-row>
        <table:table-row table:style-name="ro3">
          <table:table-cell/>
          <table:table-cell table:style-name="ce147" office:value-type="string" calcext:value-type="string">
            <text:p>Flujo de Caja Financiero (FCF)</text:p>
          </table:table-cell>
          <table:table-cell table:style-name="ce151" table:formula="of:=[.C81]+[.C87]" office:value-type="float" office:value="-177000" calcext:value-type="float">
            <text:p>-177,000</text:p>
          </table:table-cell>
          <table:table-cell table:style-name="ce151" table:formula="of:=[.D81]+[.D87]" office:value-type="float" office:value="3344.64185305084" calcext:value-type="float">
            <text:p>3,345</text:p>
          </table:table-cell>
          <table:table-cell table:style-name="ce151" table:formula="of:=[.E81]+[.E87]" office:value-type="float" office:value="16748.3333534025" calcext:value-type="float">
            <text:p>16,748</text:p>
          </table:table-cell>
          <table:table-cell table:style-name="ce151" table:formula="of:=[.F81]+[.F87]" office:value-type="float" office:value="20411.5570887858" calcext:value-type="float">
            <text:p>20,412</text:p>
          </table:table-cell>
          <table:table-cell table:style-name="ce151" table:formula="of:=[.G81]+[.G87]" office:value-type="float" office:value="32159.4709603537" calcext:value-type="float">
            <text:p>32,159</text:p>
          </table:table-cell>
          <table:table-cell table:style-name="ce151" table:formula="of:=[.H81]+[.H87]" office:value-type="float" office:value="33448.8766803626" calcext:value-type="float">
            <text:p>33,449</text:p>
          </table:table-cell>
          <table:table-cell table:style-name="ce151" table:formula="of:=[.I81]+[.I87]" office:value-type="float" office:value="-16964.6034928277" calcext:value-type="float">
            <text:p>-16,965</text:p>
          </table:table-cell>
          <table:table-cell table:style-name="ce151" table:formula="of:=[.J81]+[.J87]" office:value-type="float" office:value="36016.392062235" calcext:value-type="float">
            <text:p>36,016</text:p>
          </table:table-cell>
          <table:table-cell table:style-name="ce151" table:formula="of:=[.K81]+[.K87]" office:value-type="float" office:value="37288.93993997" calcext:value-type="float">
            <text:p>37,289</text:p>
          </table:table-cell>
          <table:table-cell table:style-name="ce151" table:formula="of:=[.L81]+[.L87]" office:value-type="float" office:value="79743.5632508215" calcext:value-type="float">
            <text:p>79,744</text:p>
          </table:table-cell>
          <table:table-cell table:style-name="ce158" table:formula="of:=[.M81]+[.M87]" office:value-type="float" office:value="82053.6376982094" calcext:value-type="float">
            <text:p>82,054</text:p>
          </table:table-cell>
          <table:table-cell table:number-columns-repeated="16371"/>
        </table:table-row>
        <table:table-row table:style-name="ro3">
          <table:table-cell/>
          <table:table-cell table:style-name="ce36" office:value-type="string" calcext:value-type="string">
            <text:p>(*) sin depreciaciones</text:p>
          </table:table-cell>
          <table:table-cell table:style-name="ce36" table:number-columns-repeated="6"/>
          <table:table-cell table:number-columns-repeated="16376"/>
        </table:table-row>
        <table:table-row table:style-name="ro3">
          <table:table-cell/>
          <table:table-cell table:style-name="ce36" office:value-type="string" calcext:value-type="string">
            <text:p>(**) sin amortizacion de intangibles</text:p>
          </table:table-cell>
          <table:table-cell table:style-name="ce36" table:number-columns-repeated="6"/>
          <table:table-cell table:number-columns-repeated="16376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9" office:value-type="string" calcext:value-type="string">
            <text:p>Comentario: Cuando se evalua un proyecto, para calcular la rentabilidad del proyecto (economico) como la del inversionistas (financiero) se debe incluir todos los beneficios. Cuando de mide la capacidad</text:p>
          </table:table-cell>
          <table:table-cell table:number-columns-repeated="16382"/>
        </table:table-row>
        <table:table-row table:style-name="ro3">
          <table:table-cell/>
          <table:table-cell table:style-name="ce9" office:value-type="string" calcext:value-type="string">
            <text:p>de pago, se debe excluir aquellos beneficios que no constituyern ingresos: El valor residual del activo fijo, <text:s/>el recupero del terreno y del capital de trabajo, en este caso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5P0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35P1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35P2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_29__20_Flujos" style:display-name="PageStyle_a) Fluj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_29__20_Leasing" style:display-name="PageStyle_b) Leasin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_29__20_Capacidad_20_de_20_pago" style:display-name="PageStyle_c) Capacidad de pag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onomia</meta:initial-creator>
    <dc:creator>E. Edison Achalma Mendoza</dc:creator>
    <meta:print-date>2000-01-13T20:45:18</meta:print-date>
    <meta:creation-date>1999-04-23T15:11:18</meta:creation-date>
    <dc:date>2022-07-08T20:52:04</dc:date>
    <meta:generator>LibreOffice/24.2.4.2$Linux_X86_64 LibreOffice_project/420$Build-2</meta:generator>
    <meta:document-statistic meta:table-count="3" meta:cell-count="1274" meta:object-count="0"/>
    <meta:user-defined meta:name="AppVersion">16.0300</meta:user-defined>
    <meta:user-defined meta:name="Company">UNIVERSIDAD DE LOS ANDES</meta:user-defined>
  </office:meta>
</office:document-meta>
</file>