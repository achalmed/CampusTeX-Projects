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</style:style>
    <style:style style:name="P2" style:family="paragraph" style:parent-style-name="Standard">
      <style:paragraph-properties fo:line-height="200%" fo:text-align="justify" style:justify-single-word="false"/>
    </style:style>
    <style:style style:name="P3" style:family="paragraph" style:parent-style-name="Standard" style:list-style-name="WWNum1">
      <style:paragraph-properties fo:line-height="200%" fo:text-align="justify" style:justify-single-word="false"/>
    </style:style>
    <style:style style:name="P4" style:family="paragraph" style:parent-style-name="Standard" style:list-style-name="WWNum2">
      <style:paragraph-properties fo:line-height="200%" fo:text-align="justify" style:justify-single-word="false"/>
    </style:style>
    <style:style style:name="P5" style:family="paragraph" style:parent-style-name="Standard">
      <style:paragraph-properties fo:margin-left="1.27cm" fo:line-height="200%"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2"><text:span text:style-name="T1">TALLER FC- 01 </text:span><text:span text:style-name="T1"/></text:p>
        <text:p text:style-name="P1" loext:marker-style-name="T2"><text:span text:style-name="T3">CREACIÓN DE UNA NUEVA EMPRESA</text:span><text:span text:style-name="T3"/></text:p>
        <text:p text:style-name="P2" loext:marker-style-name="T2"><text:span text:style-name="T2">Para evaluar la conveniencia de la creación de una nueva empresa se dispone de la siguiente información.</text:span><text:span text:style-name="T2"/></text:p>
        <text:list text:style-name="WWNum1">
          <text:list-item>
            <text:p text:style-name="P3" loext:marker-style-name="T2"><text:span text:style-name="T2">La estrategia de ventas considera un precio de introducción de S/. 100 para los primeros 3 años y de S/. 110 a partir del cuarto año.</text:span><text:span text:style-name="T2"/></text:p>
          </text:list-item>
          <text:list-item>
            <text:p text:style-name="P3" loext:marker-style-name="T2"><text:span text:style-name="T2">La proyección de la demanda supone vender 1,000 unidades en el primer año, aumentar en 20% las ventas el segundo año, en 5% el tercer y crecer en forma vegetativa en el equivalente al crecimiento de la población, se estima en 2% anual.</text:span><text:span text:style-name="T2"/></text:p>
          </text:list-item>
          <text:list-item>
            <text:p text:style-name="P3" loext:marker-style-name="T2"><text:span text:style-name="T2">Las inversiones en activos fijos corresponden a S/. 80,000 en terrenos, S/. 200,000 en construcciones que se deprecian contablemente en 40 años y S/. 100,000 en maquinarias que se deprecian en 10 años, aunque tienen una vida útil real de solo 6 años. Al final de su vida útil, podrían venderse en 50% de los que costaron.</text:span><text:span text:style-name="T2"/></text:p>
          </text:list-item>
          <text:list-item>
            <text:p text:style-name="P3" loext:marker-style-name="T2"><text:span text:style-name="T2">El costo variable unitario es de S/. 30 para cualquier nivel de actividad, y los costos fijos son de S/. 20,000 anuales.</text:span><text:span text:style-name="T2"/></text:p>
          </text:list-item>
          <text:list-item>
            <text:p text:style-name="P3" loext:marker-style-name="T2"><text:span text:style-name="T2">La tasa de impuesto a las utilidades es de 17%</text:span><text:span text:style-name="T2"/></text:p>
          </text:list-item>
          <text:list-item>
            <text:p text:style-name="P3" loext:marker-style-name="T2"><text:span text:style-name="T2">El capital de trabajo equivale a seis meses de costos de operación desembolsables.</text:span><text:span text:style-name="T2"/></text:p>
          </text:list-item>
          <text:list-item>
            <text:p text:style-name="P3" loext:marker-style-name="T2"><text:span text:style-name="T2">El horizonte de evaluación de 10 años y el valor de recupero se calcula por el método contable. No existe inflación en el horizonte de evaluación. Se pide</text:span><text:span text:style-name="T2"/></text:p>
          </text:list-item>
        </text:list>
        <text:list text:style-name="WWNum2">
          <text:list-item>
            <text:p text:style-name="P4" loext:marker-style-name="T2"><text:span text:style-name="T2">Construir el Flujo de Caja Económico.</text:span><text:span text:style-name="T2"/></text:p>
          </text:list-item>
          <text:list-item>
            <text:p text:style-name="P4" loext:marker-style-name="T2"><text:span text:style-name="T2">Construir el Flujo de Caja de la Deuda y el Flujo de Caja Financiero considerando que el 60% de la inversión fija se financia con un préstamo a ocho años a una tasa de interés efectiva de 9% anual. El capital de trabajo, la inversión de reposición y el resto de la inversión fija se financian con aporte de los inversionistas.</text:span><text:span text:style-name="T2"/></text:p>
          </text:list-item>
          <text:list-item>
            <text:p text:style-name="P4" loext:marker-style-name="T2"><text:span text:style-name="T2">Si el 60% de la maquinaria se financia con Leasing, que lleva a pagar una cuota anual de S/. 15,000, en 6 años. Obtenga el Flujo de Caja Financiero.</text:span><text:span text:style-name="T2"/></text:p>
          </text:list-item>
          <text:list-item>
            <text:p text:style-name="P4" loext:marker-style-name="T2"><text:span text:style-name="T2">Si el proyecto fuera evaluado desde la perspectiva de la entidad financiera que tiene que decidir entregar los recursos solicitados en préstamo, que consideraciones se deben tener en cuenta.</text:span><text:span text:style-name="T2"/></text:p>
          </text:list-item>
        </text:list>
        <text:p text:style-name="P5" loext:marker-style-name="T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fo:font-size="10pt" style:rfc-language-tag="es-ES-u-co-trad" fo:language="es" fo:country="ES" style:letter-kerning="false" style:font-name-asian="Times New Roman1" style:font-family-asian="'Times New Roman'" style:font-family-generic-asian="system" style:font-pitch-asian="variable" style:font-size-asian="10pt" style:language-asian="es" style:country-asian="MX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style:font-name="Arial" fo:font-family="Arial" style:font-family-generic="roman" fo:font-size="11pt" style:text-underline-style="solid" style:text-underline-width="auto" style:text-underline-color="font-color" fo:font-weight="bold" style:font-size-asian="11pt" style:font-weight-asian="bold"/>
    </style:style>
    <style:style style:name="Default_20_Paragraph_20_Font" style:display-name="Default Paragraph Font" style:family="text"/>
    <style:style style:name="Line_20_Numbering" style:display-name="Line Numbering" style:family="tex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)" style:num-suffix=".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01cm" fo:margin-bottom="2.501cm" fo:margin-left="3cm" fo:margin-right="3cm" style:writing-mode="lr-tb" style:layout-grid-color="#c0c0c0" style:layout-grid-lines="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2T16:55:00</meta:creation-date>
    <meta:initial-creator>AYACUCHO</meta:initial-creator>
    <dc:language>es-PE</dc:language>
    <dc:creator>Elmer Edison Achalma Mendoza</dc:creator>
    <meta:print-date>1999-04-22T22:41:00</meta:print-date>
    <dc:date>2023-12-31T17:42:30</dc:date>
    <meta:editing-cycles>3</meta:editing-cycles>
    <dc:title>4. Fábrica de tabletas para pisos</dc:title>
    <meta:editing-duration>P0D</meta:editing-duration>
    <meta:generator>LibreOffice/24.2.4.2$Linux_X86_64 LibreOffice_project/420$Build-2</meta:generator>
    <meta:document-statistic meta:table-count="0" meta:image-count="0" meta:object-count="0" meta:page-count="1" meta:paragraph-count="14" meta:word-count="360" meta:character-count="1958" meta:non-whitespace-character-count="1622"/>
    <meta:user-defined meta:name="AppVersion">15.0000</meta:user-defined>
    <meta:user-defined meta:name="Company">UNIVERSIDAD DE LOS ANDES</meta:user-defined>
    <meta:template xlink:type="simple" xlink:actuate="onRequest" xlink:title="ejer-flujofondos.dot" xlink:href=""/>
  </office:meta>
</office:document-meta>
</file>