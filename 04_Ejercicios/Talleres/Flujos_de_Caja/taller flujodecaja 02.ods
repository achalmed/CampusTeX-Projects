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5.846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2.965cm"/>
    </style:style>
    <style:style style:name="co10" style:family="table-column">
      <style:table-column-properties fo:break-before="auto" style:column-width="1.7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lujo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tru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cc99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ffcc99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34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1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36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33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Excel_20_Built-in_20_Comma" style:data-style-name="N134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65" style:family="table-cell" style:parent-style-name="Default" style:data-style-name="N135">
      <style:table-cell-properties style:diagonal-bl-tr="none" style:diagonal-tl-br="none" fo:border="0.74pt solid #000000" style:rotation-align="none"/>
    </style:style>
    <style:style style:name="ce66" style:family="table-cell" style:parent-style-name="Default" style:data-style-name="N135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3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39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3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35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37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35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38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84" style:family="table-cell" style:parent-style-name="Excel_20_Built-in_20_Comma" style:data-style-name="N134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diagonal-bl-tr="none" style:diagonal-tl-br="none" fo:border="none" style:rotation-align="none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uj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TALLER DE FLUJO DE CAJA ECONOMICO Y FINANCIERO</text:p>
          </table:table-cell>
          <table:table-cell table:number-columns-repeated="16380"/>
        </table:table-row>
        <table:table-row table:style-name="ro2">
          <table:table-cell/>
          <table:table-cell table:style-name="Default"/>
          <table:table-cell/>
          <table:table-cell table:style-name="ce61" office:value-type="string" calcext:value-type="string">
            <text:p>FABRICA DE TABLETAS PARA PISOS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A. PROYECTO PURO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Programa de Produccion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UBRO</text:p>
          </table:table-cell>
          <table:table-cell table:style-name="ce30" office:value-type="string" calcext:value-type="string">
            <text:p>AÑO 0</text:p>
          </table:table-cell>
          <table:table-cell table:style-name="ce30" office:value-type="string" calcext:value-type="string">
            <text:p>AÑO 1</text:p>
          </table:table-cell>
          <table:table-cell table:style-name="ce30" office:value-type="string" calcext:value-type="string">
            <text:p>AÑO 2</text:p>
          </table:table-cell>
          <table:table-cell table:style-name="ce30" office:value-type="string" calcext:value-type="string">
            <text:p>AÑO 3</text:p>
          </table:table-cell>
          <table:table-cell table:style-name="ce30" office:value-type="string" calcext:value-type="string">
            <text:p>AÑO 4</text:p>
          </table:table-cell>
          <table:table-cell table:style-name="ce82" office:value-type="string" calcext:value-type="string">
            <text:p>AÑO 5</text:p>
          </table:table-cell>
          <table:table-cell table:style-name="ce94"/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Producción m2 anuales</text:p>
          </table:table-cell>
          <table:table-cell table:style-name="ce31"/>
          <table:table-cell office:value-type="float" office:value="8000" calcext:value-type="float">
            <text:p>8000</text:p>
          </table:table-cell>
          <table:table-cell table:style-name="ce31" table:formula="of:=+[.D8]*2" office:value-type="float" office:value="16000" calcext:value-type="float">
            <text:p>16000</text:p>
          </table:table-cell>
          <table:table-cell table:number-columns-repeated="2" table:style-name="ce31" office:value-type="float" office:value="16000" calcext:value-type="float">
            <text:p>16000</text:p>
          </table:table-cell>
          <table:table-cell table:style-name="ce83" office:value-type="float" office:value="16000" calcext:value-type="float">
            <text:p>16000</text:p>
          </table:table-cell>
          <table:table-cell table:style-name="ce95"/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Precio de venta (por m2)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table:number-columns-repeated="4" table:style-name="ce31" office:value-type="float" office:value="150" calcext:value-type="float">
            <text:p>150</text:p>
          </table:table-cell>
          <table:table-cell table:style-name="ce95"/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Ingreso por ventas</text:p>
          </table:table-cell>
          <table:table-cell table:style-name="ce32"/>
          <table:table-cell table:style-name="ce62" table:formula="of:=[.D8]*[.D9]" office:value-type="float" office:value="1200000" calcext:value-type="float">
            <text:p><text:s/>1,200,000 </text:p>
          </table:table-cell>
          <table:table-cell table:style-name="ce62" table:formula="of:=[.E8]*[.E9]" office:value-type="float" office:value="2400000" calcext:value-type="float">
            <text:p><text:s/>2,400,000 </text:p>
          </table:table-cell>
          <table:table-cell table:style-name="ce62" table:formula="of:=[.F8]*[.F9]" office:value-type="float" office:value="2400000" calcext:value-type="float">
            <text:p><text:s/>2,400,000 </text:p>
          </table:table-cell>
          <table:table-cell table:style-name="ce62" table:formula="of:=[.G8]*[.G9]" office:value-type="float" office:value="2400000" calcext:value-type="float">
            <text:p><text:s/>2,400,000 </text:p>
          </table:table-cell>
          <table:table-cell table:style-name="ce84" table:formula="of:=[.H8]*[.H9]" office:value-type="float" office:value="2400000" calcext:value-type="float">
            <text:p><text:s/>2,400,000 </text:p>
          </table:table-cell>
          <table:table-cell table:style-name="ce95"/>
          <table:table-cell table:number-columns-repeated="16375"/>
        </table:table-row>
        <table:table-row table:style-name="ro1">
          <table:table-cell/>
          <table:table-cell table:style-name="ce6"/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esupuesto de Inversion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Activos</text:p>
          </table:table-cell>
          <table:table-cell table:style-name="ce8" office:value-type="string" calcext:value-type="string">
            <text:p>Año 0 </text:p>
          </table:table-cell>
          <table:table-cell table:style-name="ce8" office:value-type="string" calcext:value-type="string">
            <text:p>Año 1</text:p>
          </table:table-cell>
          <table:table-cell table:number-columns-repeated="16380"/>
        </table:table-row>
        <table:table-row table:style-name="ro1">
          <table:table-cell/>
          <table:table-cell table:style-name="ce9" office:value-type="string" calcext:value-type="string">
            <text:p>Adquisicon de terrenos</text:p>
          </table:table-cell>
          <table:table-cell table:style-name="ce33" office:value-type="float" office:value="300000" calcext:value-type="float">
            <text:p><text:s/>300,000 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Construccion de edificios</text:p>
          </table:table-cell>
          <table:table-cell table:style-name="ce33" office:value-type="float" office:value="1700000" calcext:value-type="float">
            <text:p><text:s/>1,700,000 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Adquisicion de equipos</text:p>
          </table:table-cell>
          <table:table-cell table:style-name="ce33" office:value-type="float" office:value="3000000" calcext:value-type="float">
            <text:p><text:s/>3,000,000 </text:p>
          </table:table-cell>
          <table:table-cell table:style-name="ce63" office:value-type="float" office:value="1000000" calcext:value-type="float">
            <text:p><text:s/>1,000,000 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Total inversion Fija</text:p>
          </table:table-cell>
          <table:table-cell table:style-name="ce34" table:formula="of:=SUM([.C14:.C16])" office:value-type="float" office:value="5000000" calcext:value-type="float">
            <text:p><text:s/>5,000,000 </text:p>
          </table:table-cell>
          <table:table-cell table:style-name="ce14" table:formula="of:=SUM([.D14:.D16])" office:value-type="float" office:value="1000000" calcext:value-type="float">
            <text:p>1000000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Capital de trabajo</text:p>
          </table:table-cell>
          <table:table-cell table:style-name="ce33" office:value-type="float" office:value="300000" calcext:value-type="float">
            <text:p><text:s/>300,000 </text:p>
          </table:table-cell>
          <table:table-cell table:style-name="ce13" office:value-type="float" office:value="300000" calcext:value-type="float">
            <text:p>300000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Total Capital de Trabajo</text:p>
          </table:table-cell>
          <table:table-cell table:style-name="ce34" table:formula="of:=[.C18]" office:value-type="float" office:value="300000" calcext:value-type="float">
            <text:p><text:s/>300,000 </text:p>
          </table:table-cell>
          <table:table-cell table:style-name="ce34" table:formula="of:=[.D18]" office:value-type="float" office:value="300000" calcext:value-type="float">
            <text:p><text:s/>300,000 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Total inversion </text:p>
          </table:table-cell>
          <table:table-cell table:style-name="ce35" table:formula="of:=[.C17]+[.C19]" office:value-type="float" office:value="5300000" calcext:value-type="float">
            <text:p><text:s/>5,300,000 </text:p>
          </table:table-cell>
          <table:table-cell table:style-name="ce35" table:formula="of:=[.D17]+[.D19]" office:value-type="float" office:value="1300000" calcext:value-type="float">
            <text:p><text:s/>1,300,000 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Tabla de Depreciaciones nominal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Activos</text:p>
          </table:table-cell>
          <table:table-cell table:style-name="ce8" office:value-type="string" calcext:value-type="string">
            <text:p>Vc</text:p>
          </table:table-cell>
          <table:table-cell table:style-name="ce8" office:value-type="string" calcext:value-type="string">
            <text:p>Vida util</text:p>
          </table:table-cell>
          <table:table-cell table:style-name="ce8" office:value-type="string" calcext:value-type="string">
            <text:p>Dep/año 1</text:p>
          </table:table-cell>
          <table:table-cell table:style-name="ce8" office:value-type="string" calcext:value-type="string">
            <text:p>Dep/año2</text:p>
          </table:table-cell>
          <table:table-cell table:style-name="ce8" office:value-type="string" calcext:value-type="string">
            <text:p>Dep Acum</text:p>
          </table:table-cell>
          <table:table-cell table:style-name="ce8" office:value-type="string" calcext:value-type="string">
            <text:p>Valor Cont.</text:p>
          </table:table-cell>
          <table:table-cell table:style-name="ce8" office:value-type="string" calcext:value-type="string">
            <text:p>Valor Merc.</text:p>
          </table:table-cell>
          <table:table-cell table:style-name="ce8" office:value-type="string" calcext:value-type="string">
            <text:p>Utilidad/perdida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Edificaciones</text:p>
          </table:table-cell>
          <table:table-cell table:style-name="ce36" table:formula="of:=[.C15]" office:value-type="float" office:value="1700000" calcext:value-type="float">
            <text:p><text:s/>1,700,000 </text:p>
          </table:table-cell>
          <table:table-cell office:value-type="float" office:value="20" calcext:value-type="float">
            <text:p>20</text:p>
          </table:table-cell>
          <table:table-cell table:style-name="ce31" table:formula="of:=[.C24]*(1/[.D24])" office:value-type="float" office:value="85000" calcext:value-type="float">
            <text:p>85000</text:p>
          </table:table-cell>
          <table:table-cell table:style-name="ce31" table:formula="of:=[.E24]" office:value-type="float" office:value="85000" calcext:value-type="float">
            <text:p>85000</text:p>
          </table:table-cell>
          <table:table-cell table:style-name="ce31" table:formula="of:=[.F24]*5" office:value-type="float" office:value="425000" calcext:value-type="float">
            <text:p>425000</text:p>
          </table:table-cell>
          <table:table-cell table:style-name="ce36" table:formula="of:=[.C24]-[.G24]" office:value-type="float" office:value="1275000" calcext:value-type="float">
            <text:p><text:s/>1,275,000 </text:p>
          </table:table-cell>
          <table:table-cell table:style-name="ce33" office:value-type="float" office:value="2500000" calcext:value-type="float">
            <text:p><text:s/>2,500,000 </text:p>
          </table:table-cell>
          <table:table-cell table:style-name="ce36" table:formula="of:=[.I24]-[.H24]" office:value-type="float" office:value="1225000" calcext:value-type="float">
            <text:p><text:s/>1,225,000 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Equipos año 0</text:p>
          </table:table-cell>
          <table:table-cell table:style-name="ce36" table:formula="of:=[.C16]" office:value-type="float" office:value="3000000" calcext:value-type="float">
            <text:p><text:s/>3,000,000 </text:p>
          </table:table-cell>
          <table:table-cell office:value-type="float" office:value="10" calcext:value-type="float">
            <text:p>10</text:p>
          </table:table-cell>
          <table:table-cell table:style-name="ce31" table:formula="of:=[.C25]*(1/[.D25])" office:value-type="float" office:value="300000" calcext:value-type="float">
            <text:p>300000</text:p>
          </table:table-cell>
          <table:table-cell table:style-name="ce31" table:formula="of:=[.E25]" office:value-type="float" office:value="300000" calcext:value-type="float">
            <text:p>300000</text:p>
          </table:table-cell>
          <table:table-cell table:style-name="ce31" table:formula="of:=[.F25]*5" office:value-type="float" office:value="1500000" calcext:value-type="float">
            <text:p>1500000</text:p>
          </table:table-cell>
          <table:table-cell table:style-name="ce36" table:formula="of:=[.C25]-[.G25]" office:value-type="float" office:value="1500000" calcext:value-type="float">
            <text:p><text:s/>1,500,000 </text:p>
          </table:table-cell>
          <table:table-cell table:style-name="ce31" table:number-columns-repeated="2"/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Equipos año 1</text:p>
          </table:table-cell>
          <table:table-cell table:style-name="ce33" office:value-type="float" office:value="1000000" calcext:value-type="float">
            <text:p><text:s/>1,000,000 </text:p>
          </table:table-cell>
          <table:table-cell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6]*(1/[.D26])" office:value-type="float" office:value="100000" calcext:value-type="float">
            <text:p>100000</text:p>
          </table:table-cell>
          <table:table-cell table:style-name="ce31" table:formula="of:=[.F26]*4" office:value-type="float" office:value="400000" calcext:value-type="float">
            <text:p>400000</text:p>
          </table:table-cell>
          <table:table-cell table:style-name="ce36" table:formula="of:=[.C26]-[.G26]" office:value-type="float" office:value="600000" calcext:value-type="float">
            <text:p><text:s/>600,000 </text:p>
          </table:table-cell>
          <table:table-cell table:style-name="ce33" office:value-type="float" office:value="600000" calcext:value-type="float">
            <text:p><text:s/>600,000 </text:p>
          </table:table-cell>
          <table:table-cell table:style-name="ce36" table:formula="of:=[.I26]-[.H25]-[.H26]" office:value-type="float" office:value="-1500000" calcext:value-type="float">
            <text:p><text:s/>(1,500,000)</text:p>
          </table:table-cell>
          <table:table-cell table:number-columns-repeated="16374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8" table:number-columns-repeated="2"/>
          <table:table-cell table:style-name="ce8" table:formula="of:=SUM([.E24:.E26])" office:value-type="float" office:value="385000" calcext:value-type="float">
            <text:p>385000</text:p>
          </table:table-cell>
          <table:table-cell table:style-name="ce8" table:formula="of:=SUM([.F24:.F26])" office:value-type="float" office:value="485000" calcext:value-type="float">
            <text:p>485000</text:p>
          </table:table-cell>
          <table:table-cell table:style-name="ce8" table:number-columns-repeated="4"/>
          <table:table-cell table:number-columns-repeated="1637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 table:number-columns-spanned="7" table:number-rows-spanned="1">
            <text:p>ESTADO DE RESULTADOS</text:p>
          </table:table-cell>
          <table:covered-table-cell table:number-columns-repeated="6" table:style-name="ce37"/>
          <table:table-cell table:number-columns-repeated="1637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RUBRO</text:p>
          </table:table-cell>
          <table:table-cell table:style-name="ce11"/>
          <table:table-cell table:style-name="ce11" office:value-type="string" calcext:value-type="string">
            <text:p>Año 1</text:p>
          </table:table-cell>
          <table:table-cell table:style-name="ce11" office:value-type="string" calcext:value-type="string">
            <text:p>Año 2</text:p>
          </table:table-cell>
          <table:table-cell table:style-name="ce11" office:value-type="string" calcext:value-type="string">
            <text:p>Año 3</text:p>
          </table:table-cell>
          <table:table-cell table:style-name="ce11" office:value-type="string" calcext:value-type="string">
            <text:p>Año 4</text:p>
          </table:table-cell>
          <table:table-cell table:style-name="ce11" office:value-type="string" calcext:value-type="string">
            <text:p>Añ0 5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Ventas netas</text:p>
          </table:table-cell>
          <table:table-cell table:style-name="ce36"/>
          <table:table-cell table:style-name="ce36" table:formula="of:=[.D10]" office:value-type="float" office:value="1200000" calcext:value-type="float">
            <text:p><text:s/>1,200,000 </text:p>
          </table:table-cell>
          <table:table-cell table:style-name="ce36" table:formula="of:=[.E10]" office:value-type="float" office:value="2400000" calcext:value-type="float">
            <text:p><text:s/>2,400,000 </text:p>
          </table:table-cell>
          <table:table-cell table:style-name="ce36" table:formula="of:=[.F10]" office:value-type="float" office:value="2400000" calcext:value-type="float">
            <text:p><text:s/>2,400,000 </text:p>
          </table:table-cell>
          <table:table-cell table:style-name="ce36" table:formula="of:=[.G10]" office:value-type="float" office:value="2400000" calcext:value-type="float">
            <text:p><text:s/>2,400,000 </text:p>
          </table:table-cell>
          <table:table-cell table:style-name="ce36" table:formula="of:=[.H10]" office:value-type="float" office:value="2400000" calcext:value-type="float">
            <text:p><text:s/>2,400,000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Mano de obra</text:p>
          </table:table-cell>
          <table:table-cell table:style-name="ce31"/>
          <table:table-cell office:value-type="float" office:value="-75000" calcext:value-type="float">
            <text:p>-75000</text:p>
          </table:table-cell>
          <table:table-cell table:number-columns-repeated="4" table:style-name="ce31" office:value-type="float" office:value="-150000" calcext:value-type="float">
            <text:p>-15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Materia prima y combustible</text:p>
          </table:table-cell>
          <table:table-cell table:style-name="ce31"/>
          <table:table-cell office:value-type="float" office:value="-90000" calcext:value-type="float">
            <text:p>-90000</text:p>
          </table:table-cell>
          <table:table-cell table:number-columns-repeated="4" table:style-name="ce31" office:value-type="float" office:value="-180000" calcext:value-type="float">
            <text:p>-18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Mantenimiento y repuestos</text:p>
          </table:table-cell>
          <table:table-cell table:style-name="ce31"/>
          <table:table-cell office:value-type="float" office:value="-15000" calcext:value-type="float">
            <text:p>-15000</text:p>
          </table:table-cell>
          <table:table-cell table:number-columns-repeated="4" table:style-name="ce31" office:value-type="float" office:value="-30000" calcext:value-type="float">
            <text:p>-3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Otros gastos de operación</text:p>
          </table:table-cell>
          <table:table-cell table:style-name="ce31"/>
          <table:table-cell office:value-type="float" office:value="-15000" calcext:value-type="float">
            <text:p>-15000</text:p>
          </table:table-cell>
          <table:table-cell table:style-name="ce31" table:formula="of:=-30000" office:value-type="float" office:value="-30000" calcext:value-type="float">
            <text:p>-30000</text:p>
          </table:table-cell>
          <table:table-cell table:style-name="ce31" table:formula="of:=-30000" office:value-type="float" office:value="-30000" calcext:value-type="float">
            <text:p>-30000</text:p>
          </table:table-cell>
          <table:table-cell table:style-name="ce31" table:formula="of:=-30000" office:value-type="float" office:value="-30000" calcext:value-type="float">
            <text:p>-30000</text:p>
          </table:table-cell>
          <table:table-cell table:style-name="ce31" table:formula="of:=-30000" office:value-type="float" office:value="-30000" calcext:value-type="float">
            <text:p>-3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Estudios previos</text:p>
          </table:table-cell>
          <table:table-cell table:style-name="ce31"/>
          <table:table-cell office:value-type="float" office:value="-300000" calcext:value-type="float">
            <text:p>-300000</text:p>
          </table:table-cell>
          <table:table-cell table:style-name="ce31" table:number-columns-repeated="4"/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Depreciaciones</text:p>
          </table:table-cell>
          <table:table-cell table:style-name="ce31"/>
          <table:table-cell table:style-name="ce64" table:formula="of:=-[.E27]*[.D49]" office:value-type="float" office:value="-373786.40776699" calcext:value-type="float">
            <text:p><text:s/>-373,786 </text:p>
          </table:table-cell>
          <table:table-cell table:style-name="ce64" table:formula="of:=-[.$F$27]*[.E49]" office:value-type="float" office:value="-457159.015929871" calcext:value-type="float">
            <text:p><text:s/>-457,159 </text:p>
          </table:table-cell>
          <table:table-cell table:style-name="ce64" table:formula="of:=-[.$F$27]*[.F49]" office:value-type="float" office:value="-443843.704786282" calcext:value-type="float">
            <text:p><text:s/>-443,844 </text:p>
          </table:table-cell>
          <table:table-cell table:style-name="ce64" table:formula="of:=-[.$F$27]*[.G49]" office:value-type="float" office:value="-430916.218239109" calcext:value-type="float">
            <text:p><text:s/>-430,916 </text:p>
          </table:table-cell>
          <table:table-cell table:style-name="ce64" table:formula="of:=-[.$F$27]*[.H49]" office:value-type="float" office:value="-418365.26042632" calcext:value-type="float">
            <text:p><text:s/>-418,365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Utilidad por venta de edificios</text:p>
          </table:table-cell>
          <table:table-cell table:style-name="ce31"/>
          <table:table-cell/>
          <table:table-cell table:style-name="ce31" table:number-columns-repeated="3"/>
          <table:table-cell table:style-name="ce36" table:formula="of:=[.J24]" office:value-type="float" office:value="1225000" calcext:value-type="float">
            <text:p><text:s/>1,225,000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Perdida en la venta de equipos</text:p>
          </table:table-cell>
          <table:table-cell table:style-name="ce31"/>
          <table:table-cell table:style-name="ce36"/>
          <table:table-cell table:style-name="ce31" table:number-columns-repeated="3"/>
          <table:table-cell table:style-name="ce36" table:formula="of:=[.J26]" office:value-type="float" office:value="-1500000" calcext:value-type="float">
            <text:p><text:s/>(1,500,000)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Utilidad Bruta</text:p>
          </table:table-cell>
          <table:table-cell table:style-name="ce14"/>
          <table:table-cell table:style-name="ce34" table:formula="of:=SUM([.D33:.D41])" office:value-type="float" office:value="331213.59223301" calcext:value-type="float">
            <text:p><text:s/>331,214 </text:p>
          </table:table-cell>
          <table:table-cell table:style-name="ce34" table:formula="of:=SUM([.E33:.E41])" office:value-type="float" office:value="1552840.98407013" calcext:value-type="float">
            <text:p><text:s/>1,552,841 </text:p>
          </table:table-cell>
          <table:table-cell table:style-name="ce34" table:formula="of:=SUM([.F33:.F41])" office:value-type="float" office:value="1566156.29521372" calcext:value-type="float">
            <text:p><text:s/>1,566,156 </text:p>
          </table:table-cell>
          <table:table-cell table:style-name="ce34" table:formula="of:=SUM([.G33:.G41])" office:value-type="float" office:value="1579083.78176089" calcext:value-type="float">
            <text:p><text:s/>1,579,084 </text:p>
          </table:table-cell>
          <table:table-cell table:style-name="ce34" table:formula="of:=SUM([.H33:.H41])" office:value-type="float" office:value="1316634.73957368" calcext:value-type="float">
            <text:p><text:s/>1,316,635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Costos de Administracion</text:p>
          </table:table-cell>
          <table:table-cell table:style-name="ce31"/>
          <table:table-cell office:value-type="float" office:value="-75000" calcext:value-type="float">
            <text:p>-75000</text:p>
          </table:table-cell>
          <table:table-cell table:number-columns-repeated="4" table:style-name="ce31" office:value-type="float" office:value="-150000" calcext:value-type="float">
            <text:p>-150000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Publicidad y Ventas</text:p>
          </table:table-cell>
          <table:table-cell table:style-name="ce31"/>
          <table:table-cell office:value-type="float" office:value="-30000" calcext:value-type="float">
            <text:p>-30000</text:p>
          </table:table-cell>
          <table:table-cell table:number-columns-repeated="4" table:style-name="ce31" office:value-type="float" office:value="-60000" calcext:value-type="float">
            <text:p>-60000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Utilidad Imponible</text:p>
          </table:table-cell>
          <table:table-cell table:style-name="ce14"/>
          <table:table-cell table:style-name="ce34" table:formula="of:=SUM([.D42:.D44])" office:value-type="float" office:value="226213.59223301" calcext:value-type="float">
            <text:p><text:s/>226,214 </text:p>
          </table:table-cell>
          <table:table-cell table:style-name="ce34" table:formula="of:=SUM([.E42:.E44])" office:value-type="float" office:value="1342840.98407013" calcext:value-type="float">
            <text:p><text:s/>1,342,841 </text:p>
          </table:table-cell>
          <table:table-cell table:style-name="ce34" table:formula="of:=SUM([.F42:.F44])" office:value-type="float" office:value="1356156.29521372" calcext:value-type="float">
            <text:p><text:s/>1,356,156 </text:p>
          </table:table-cell>
          <table:table-cell table:style-name="ce34" table:formula="of:=SUM([.G42:.G44])" office:value-type="float" office:value="1369083.78176089" calcext:value-type="float">
            <text:p><text:s/>1,369,084 </text:p>
          </table:table-cell>
          <table:table-cell table:style-name="ce34" table:formula="of:=SUM([.H42:.H44])" office:value-type="float" office:value="1106634.73957368" calcext:value-type="float">
            <text:p><text:s/>1,106,635 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Impuestos</text:p>
          </table:table-cell>
          <table:table-cell table:style-name="ce31"/>
          <table:table-cell table:style-name="ce65" table:formula="of:=-[.D45]*0.15" office:value-type="float" office:value="-33932.0388349515" calcext:value-type="float">
            <text:p><text:s/>-33,932.0 </text:p>
          </table:table-cell>
          <table:table-cell table:style-name="ce65" table:formula="of:=-[.E45]*0.15" office:value-type="float" office:value="-201426.147610519" calcext:value-type="float">
            <text:p><text:s/>-201,426.1 </text:p>
          </table:table-cell>
          <table:table-cell table:style-name="ce65" table:formula="of:=-[.F45]*0.15" office:value-type="float" office:value="-203423.444282058" calcext:value-type="float">
            <text:p><text:s/>-203,423.4 </text:p>
          </table:table-cell>
          <table:table-cell table:style-name="ce65" table:formula="of:=-[.G45]*0.15" office:value-type="float" office:value="-205362.567264134" calcext:value-type="float">
            <text:p><text:s/>-205,362.6 </text:p>
          </table:table-cell>
          <table:table-cell table:style-name="ce65" table:formula="of:=-[.H45]*0.15" office:value-type="float" office:value="-165995.210936052" calcext:value-type="float">
            <text:p><text:s/>-165,995.2 </text:p>
          </table:table-cell>
          <table:table-cell table:number-columns-repeated="16376"/>
        </table:table-row>
        <table:table-row table:style-name="ro1">
          <table:table-cell/>
          <table:table-cell table:style-name="ce8" office:value-type="string" calcext:value-type="string">
            <text:p>Utlidad Neta</text:p>
          </table:table-cell>
          <table:table-cell table:style-name="ce8"/>
          <table:table-cell table:style-name="ce66" table:formula="of:=[.D45]+[.D46]" office:value-type="float" office:value="192281.553398058" calcext:value-type="float">
            <text:p><text:s/>192,281.6 </text:p>
          </table:table-cell>
          <table:table-cell table:style-name="ce66" table:formula="of:=[.E45]+[.E46]" office:value-type="float" office:value="1141414.83645961" calcext:value-type="float">
            <text:p><text:s/>1,141,414.8 </text:p>
          </table:table-cell>
          <table:table-cell table:style-name="ce66" table:formula="of:=[.F45]+[.F46]" office:value-type="float" office:value="1152732.85093166" calcext:value-type="float">
            <text:p><text:s/>1,152,732.9 </text:p>
          </table:table-cell>
          <table:table-cell table:style-name="ce66" table:formula="of:=[.G45]+[.G46]" office:value-type="float" office:value="1163721.21449676" calcext:value-type="float">
            <text:p><text:s/>1,163,721.2 </text:p>
          </table:table-cell>
          <table:table-cell table:style-name="ce66" table:formula="of:=[.H45]+[.H46]" office:value-type="float" office:value="940639.528637628" calcext:value-type="float">
            <text:p><text:s/>940,639.5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7"/>
          <table:table-cell table:style-name="ce67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actor de Actualizacion</text:p>
          </table:table-cell>
          <table:table-cell table:style-name="ce7"/>
          <table:table-cell table:style-name="ce68" table:formula="of:=1/POWER(1.03;1)" office:value-type="float" office:value="0.970873786407767" calcext:value-type="float">
            <text:p><text:s/>0.9709 </text:p>
          </table:table-cell>
          <table:table-cell table:style-name="ce68" table:formula="of:=1/POWER(1.03;2)" office:value-type="float" office:value="0.942595909133754" calcext:value-type="float">
            <text:p><text:s/>0.9426 </text:p>
          </table:table-cell>
          <table:table-cell table:style-name="ce68" table:formula="of:=1/POWER(1.03;3)" office:value-type="float" office:value="0.91514165935316" calcext:value-type="float">
            <text:p><text:s/>0.9151 </text:p>
          </table:table-cell>
          <table:table-cell table:style-name="ce68" table:formula="of:=1/POWER(1.03;4)" office:value-type="float" office:value="0.888487047915689" calcext:value-type="float">
            <text:p><text:s/>0.8885 </text:p>
          </table:table-cell>
          <table:table-cell table:style-name="ce68" table:formula="of:=1/POWER(1.03;5)" office:value-type="float" office:value="0.862608784384164" calcext:value-type="float">
            <text:p><text:s/>0.8626 </text:p>
          </table:table-cell>
          <table:table-cell table:number-columns-repeated="16376"/>
        </table:table-row>
        <table:table-row table:style-name="ro1" table:number-rows-repeated="2">
          <table:table-cell table:number-columns-repeated="2"/>
          <table:table-cell table:style-name="ce7"/>
          <table:table-cell table:style-name="ce67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B. PROYECTO FINANCIADO</text:p>
          </table:table-cell>
          <table:table-cell table:style-name="ce7"/>
          <table:table-cell table:style-name="ce67" table:number-columns-repeated="5"/>
          <table:table-cell table:number-columns-repeated="16376"/>
        </table:table-row>
        <table:table-row table:style-name="ro1">
          <table:table-cell table:number-columns-repeated="2"/>
          <table:table-cell table:style-name="ce7"/>
          <table:table-cell table:style-name="ce67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MORTIZACION DE LA DEUDA</text:p>
          </table:table-cell>
          <table:table-cell table:style-name="ce7"/>
          <table:table-cell table:style-name="ce67" table:number-columns-repeated="5"/>
          <table:table-cell table:number-columns-repeated="16376"/>
        </table:table-row>
        <table:table-row table:style-name="ro1">
          <table:table-cell table:number-columns-repeated="2"/>
          <table:table-cell table:style-name="ce7"/>
          <table:table-cell table:style-name="ce67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nto del prestamo</text:p>
          </table:table-cell>
          <table:table-cell table:style-name="ce38" table:formula="of:=3000000" office:value-type="currency" office:currency="S/." office:value="3000000" calcext:value-type="currency">
            <text:p><text:s/>S/. 3,000,000 </text:p>
          </table:table-cell>
          <table:table-cell table:style-name="ce69"/>
          <table:table-cell table:style-name="ce67" table:number-columns-repeated="4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EA</text:p>
          </table:table-cell>
          <table:table-cell table:style-name="ce39" office:value-type="percentage" office:value="0.15" calcext:value-type="percentage">
            <text:p>15 %</text:p>
          </table:table-cell>
          <table:table-cell table:style-name="ce67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7" office:value-type="float" office:value="5" calcext:value-type="float">
            <text:p>5</text:p>
          </table:table-cell>
          <table:table-cell table:style-name="ce67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AGO</text:p>
          </table:table-cell>
          <table:table-cell table:style-name="ce40" table:formula="of:=-PMT([.C57];[.C58];[.C56])" office:value-type="float" office:value="894946.657384585" calcext:value-type="float">
            <text:p>S/. 894,947</text:p>
          </table:table-cell>
          <table:table-cell table:style-name="ce67" table:number-columns-repeated="5"/>
          <table:table-cell table:number-columns-repeated="16376"/>
        </table:table-row>
        <table:table-row table:style-name="ro1">
          <table:table-cell table:number-columns-repeated="2"/>
          <table:table-cell table:style-name="ce7"/>
          <table:table-cell table:style-name="ce67" table:number-columns-repeated="5"/>
          <table:table-cell table:number-columns-repeated="16376"/>
        </table:table-row>
        <table:table-row table:style-name="ro1">
          <table:table-cell/>
          <table:table-cell table:style-name="ce15" office:value-type="string" calcext:value-type="string">
            <text:p>PERIODO</text:p>
          </table:table-cell>
          <table:table-cell table:style-name="ce15" office:value-type="string" calcext:value-type="string">
            <text:p>Año 0</text:p>
          </table:table-cell>
          <table:table-cell table:style-name="ce70" office:value-type="string" office:string-value="Año 1" calcext:value-type="string">
            <text:p><text:s/>Año 1 </text:p>
          </table:table-cell>
          <table:table-cell table:style-name="ce70" office:value-type="string" office:string-value="Año 2" calcext:value-type="string">
            <text:p><text:s/>Año 2 </text:p>
          </table:table-cell>
          <table:table-cell table:style-name="ce70" office:value-type="string" office:string-value="Año3" calcext:value-type="string">
            <text:p><text:s/>Año3 </text:p>
          </table:table-cell>
          <table:table-cell table:style-name="ce70" office:value-type="string" office:string-value="Año 4" calcext:value-type="string">
            <text:p><text:s/>Año 4 </text:p>
          </table:table-cell>
          <table:table-cell table:style-name="ce70" office:value-type="string" office:string-value="Año 5" calcext:value-type="string">
            <text:p><text:s/>Año 5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Deuda Inicial</text:p>
          </table:table-cell>
          <table:table-cell table:style-name="ce41" table:formula="of:=[.C56]" office:value-type="currency" office:currency="S/." office:value="3000000" calcext:value-type="currency">
            <text:p><text:s/>S/. 3,000,000 </text:p>
          </table:table-cell>
          <table:table-cell table:style-name="ce71" table:formula="of:=[.C66]" office:value-type="float" office:value="3000000" calcext:value-type="float">
            <text:p><text:s/>3,000,000 </text:p>
          </table:table-cell>
          <table:table-cell table:style-name="ce71" table:formula="of:=[.D66]" office:value-type="float" office:value="2555053.34261542" calcext:value-type="float">
            <text:p><text:s/>2,555,053 </text:p>
          </table:table-cell>
          <table:table-cell table:style-name="ce71" table:formula="of:=[.E66]" office:value-type="float" office:value="2043364.68662314" calcext:value-type="float">
            <text:p><text:s/>2,043,365 </text:p>
          </table:table-cell>
          <table:table-cell table:style-name="ce71" table:formula="of:=[.F66]" office:value-type="float" office:value="1454922.73223203" calcext:value-type="float">
            <text:p><text:s/>1,454,923 </text:p>
          </table:table-cell>
          <table:table-cell table:style-name="ce71" table:formula="of:=[.G66]" office:value-type="float" office:value="778214.484682248" calcext:value-type="float">
            <text:p><text:s/>778,214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Interes</text:p>
          </table:table-cell>
          <table:table-cell table:style-name="ce10" office:value-type="float" office:value="0" calcext:value-type="float">
            <text:p>0</text:p>
          </table:table-cell>
          <table:table-cell table:style-name="ce72" table:formula="of:=[.D62]*[.$C$57]" office:value-type="float" office:value="450000" calcext:value-type="float">
            <text:p><text:s/>450,000.0 </text:p>
          </table:table-cell>
          <table:table-cell table:style-name="ce71" table:formula="of:=[.E62]*[.$C$57]" office:value-type="float" office:value="383258.001392312" calcext:value-type="float">
            <text:p><text:s/>383,258 </text:p>
          </table:table-cell>
          <table:table-cell table:style-name="ce71" table:formula="of:=[.F62]*[.$C$57]" office:value-type="float" office:value="306504.702993471" calcext:value-type="float">
            <text:p><text:s/>306,505 </text:p>
          </table:table-cell>
          <table:table-cell table:style-name="ce71" table:formula="of:=[.G62]*[.$C$57]" office:value-type="float" office:value="218238.409834804" calcext:value-type="float">
            <text:p><text:s/>218,238 </text:p>
          </table:table-cell>
          <table:table-cell table:style-name="ce71" table:formula="of:=[.H62]*[.$C$57]" office:value-type="float" office:value="116732.172702337" calcext:value-type="float">
            <text:p><text:s/>116,732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Capital</text:p>
          </table:table-cell>
          <table:table-cell table:style-name="ce10" office:value-type="float" office:value="0" calcext:value-type="float">
            <text:p>0</text:p>
          </table:table-cell>
          <table:table-cell table:style-name="ce73" table:formula="of:=[.D65]-[.D63]" office:value-type="float" office:value="444946.657384585" calcext:value-type="float">
            <text:p><text:s/>444,947 </text:p>
          </table:table-cell>
          <table:table-cell table:style-name="ce73" table:formula="of:=[.E65]-[.E63]" office:value-type="float" office:value="511688.655992273" calcext:value-type="float">
            <text:p><text:s/>511,689 </text:p>
          </table:table-cell>
          <table:table-cell table:style-name="ce73" table:formula="of:=[.F65]-[.F63]" office:value-type="float" office:value="588441.954391114" calcext:value-type="float">
            <text:p><text:s/>588,442 </text:p>
          </table:table-cell>
          <table:table-cell table:style-name="ce73" table:formula="of:=[.G65]-[.G63]" office:value-type="float" office:value="676708.247549781" calcext:value-type="float">
            <text:p><text:s/>676,708 </text:p>
          </table:table-cell>
          <table:table-cell table:style-name="ce73" table:formula="of:=[.H65]-[.H63]" office:value-type="float" office:value="778214.484682248" calcext:value-type="float">
            <text:p><text:s/>778,214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Amortizacion de la deuda</text:p>
          </table:table-cell>
          <table:table-cell table:style-name="ce10" office:value-type="float" office:value="0" calcext:value-type="float">
            <text:p>0</text:p>
          </table:table-cell>
          <table:table-cell table:style-name="ce71" table:formula="of:=[.$C$59]" office:value-type="float" office:value="894946.657384585" calcext:value-type="float">
            <text:p><text:s/>894,947 </text:p>
          </table:table-cell>
          <table:table-cell table:style-name="ce71" table:formula="of:=[.$C$59]" office:value-type="float" office:value="894946.657384585" calcext:value-type="float">
            <text:p><text:s/>894,947 </text:p>
          </table:table-cell>
          <table:table-cell table:style-name="ce71" table:formula="of:=[.$C$59]" office:value-type="float" office:value="894946.657384585" calcext:value-type="float">
            <text:p><text:s/>894,947 </text:p>
          </table:table-cell>
          <table:table-cell table:style-name="ce71" table:formula="of:=[.$C$59]" office:value-type="float" office:value="894946.657384585" calcext:value-type="float">
            <text:p><text:s/>894,947 </text:p>
          </table:table-cell>
          <table:table-cell table:style-name="ce71" table:formula="of:=[.$C$59]" office:value-type="float" office:value="894946.657384585" calcext:value-type="float">
            <text:p><text:s/>894,947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Deuda Final</text:p>
          </table:table-cell>
          <table:table-cell table:style-name="ce42" table:formula="of:=[.C62]-[.C64]" office:value-type="currency" office:currency="S/." office:value="3000000" calcext:value-type="currency">
            <text:p><text:s/>S/. 3,000,000 </text:p>
          </table:table-cell>
          <table:table-cell table:style-name="ce42" table:formula="of:=[.D62]-[.D64]" office:value-type="currency" office:currency="S/." office:value="2555053.34261542" calcext:value-type="currency">
            <text:p><text:s/>S/. 2,555,053 </text:p>
          </table:table-cell>
          <table:table-cell table:style-name="ce42" table:formula="of:=[.E62]-[.E64]" office:value-type="currency" office:currency="S/." office:value="2043364.68662314" calcext:value-type="currency">
            <text:p><text:s/>S/. 2,043,365 </text:p>
          </table:table-cell>
          <table:table-cell table:style-name="ce42" table:formula="of:=[.F62]-[.F64]" office:value-type="currency" office:currency="S/." office:value="1454922.73223203" calcext:value-type="currency">
            <text:p><text:s/>S/. 1,454,923 </text:p>
          </table:table-cell>
          <table:table-cell table:style-name="ce42" table:formula="of:=[.G62]-[.G64]" office:value-type="currency" office:currency="S/." office:value="778214.484682248" calcext:value-type="currency">
            <text:p><text:s/>S/. 778,214 </text:p>
          </table:table-cell>
          <table:table-cell table:style-name="ce42" table:formula="of:=[.H62]-[.H64]" office:value-type="currency" office:currency="S/." office:value="0" calcext:value-type="currency">
            <text:p><text:s/>S/. - <text:s text:c="2"/></text:p>
          </table:table-cell>
          <table:table-cell table:number-columns-repeated="16376"/>
        </table:table-row>
        <table:table-row table:style-name="ro1" table:number-rows-repeated="3">
          <table:table-cell table:number-columns-repeated="2"/>
          <table:table-cell table:style-name="ce7"/>
          <table:table-cell table:style-name="ce67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actor de Actualizacion</text:p>
          </table:table-cell>
          <table:table-cell table:style-name="ce7"/>
          <table:table-cell table:style-name="ce68" table:formula="of:=1/POWER(1.03;1)" office:value-type="float" office:value="0.970873786407767" calcext:value-type="float">
            <text:p><text:s/>0.9709 </text:p>
          </table:table-cell>
          <table:table-cell table:style-name="ce68" table:formula="of:=1/POWER(1.03;2)" office:value-type="float" office:value="0.942595909133754" calcext:value-type="float">
            <text:p><text:s/>0.9426 </text:p>
          </table:table-cell>
          <table:table-cell table:style-name="ce68" table:formula="of:=1/POWER(1.03;3)" office:value-type="float" office:value="0.91514165935316" calcext:value-type="float">
            <text:p><text:s/>0.9151 </text:p>
          </table:table-cell>
          <table:table-cell table:style-name="ce68" table:formula="of:=1/POWER(1.03;4)" office:value-type="float" office:value="0.888487047915689" calcext:value-type="float">
            <text:p><text:s/>0.8885 </text:p>
          </table:table-cell>
          <table:table-cell table:style-name="ce68" table:formula="of:=1/POWER(1.03;5)" office:value-type="float" office:value="0.862608784384164" calcext:value-type="float">
            <text:p><text:s/>0.8626 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FLUJOS DE CAJA ECONOMICO Y FINANCIERO</text:p>
          </table:table-cell>
          <table:covered-table-cell table:number-columns-repeated="5" table:style-name="ce43"/>
          <table:covered-table-cell table:style-name="ce85"/>
          <table:table-cell table:number-columns-repeated="1637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RUBROS</text:p>
          </table:table-cell>
          <table:table-cell table:style-name="ce44" office:value-type="string" calcext:value-type="string" table:number-columns-spanned="6" table:number-rows-spanned="1">
            <text:p>PERIODOS</text:p>
          </table:table-cell>
          <table:covered-table-cell table:number-columns-repeated="4" table:style-name="ce74"/>
          <table:covered-table-cell table:style-name="ce86"/>
          <table:table-cell table:number-columns-repeated="16376"/>
        </table:table-row>
        <table:table-row table:style-name="ro1">
          <table:table-cell/>
          <table:covered-table-cell table:style-name="ce18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96"/>
          <table:table-cell table:number-columns-repeated="16375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Inversiones y Liquidación</text:p>
          </table:table-cell>
          <table:covered-table-cell table:number-columns-repeated="5" table:style-name="ce46"/>
          <table:covered-table-cell table:style-name="ce87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Activo Fijo Tangible (-)</text:p>
          </table:table-cell>
          <table:table-cell table:style-name="ce47" table:formula="of:=-[.C17]" office:value-type="float" office:value="-5000000" calcext:value-type="float">
            <text:p>-5,000,000</text:p>
          </table:table-cell>
          <table:table-cell table:style-name="ce47" table:formula="of:=-[.D17]" office:value-type="float" office:value="-1000000" calcext:value-type="float">
            <text:p>-1,000,000</text:p>
          </table:table-cell>
          <table:table-cell table:style-name="ce81" table:number-columns-repeated="3"/>
          <table:table-cell table:style-name="ce88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Activo Fijo Intangible(-)</text:p>
          </table:table-cell>
          <table:table-cell table:style-name="ce48" office:value-type="float" office:value="0" calcext:value-type="float">
            <text:p>0</text:p>
          </table:table-cell>
          <table:table-cell table:style-name="ce75" table:number-columns-repeated="4"/>
          <table:table-cell table:style-name="ce89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Capital de Trabajo (-)</text:p>
          </table:table-cell>
          <table:table-cell table:style-name="ce48" table:formula="of:=-[.C19]" office:value-type="float" office:value="-300000" calcext:value-type="float">
            <text:p>-300,000</text:p>
          </table:table-cell>
          <table:table-cell table:style-name="ce48" table:formula="of:=-[.D19]" office:value-type="float" office:value="-300000" calcext:value-type="float">
            <text:p>-300,000</text:p>
          </table:table-cell>
          <table:table-cell table:style-name="ce75" table:number-columns-repeated="3"/>
          <table:table-cell table:style-name="ce89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ngresos venta de Edificios (+)</text:p>
          </table:table-cell>
          <table:table-cell table:style-name="ce48"/>
          <table:table-cell table:style-name="ce75" table:number-columns-repeated="4"/>
          <table:table-cell table:style-name="ce89" table:formula="of:=[.I24]" office:value-type="float" office:value="2500000" calcext:value-type="float">
            <text:p>2,50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ngresos por venta de Equipos (+)</text:p>
          </table:table-cell>
          <table:table-cell table:style-name="ce48"/>
          <table:table-cell table:style-name="ce75" table:number-columns-repeated="4"/>
          <table:table-cell table:style-name="ce89" table:formula="of:=[.I26]" office:value-type="float" office:value="600000" calcext:value-type="float">
            <text:p>60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Valor recupero Capital Trabajo (+)</text:p>
          </table:table-cell>
          <table:table-cell table:style-name="ce48"/>
          <table:table-cell table:style-name="ce75" table:number-columns-repeated="4"/>
          <table:table-cell table:style-name="ce89" table:formula="of:=-([.C80]+[.D80])" office:value-type="float" office:value="600000" calcext:value-type="float">
            <text:p>60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Valor recupero de Terreno (+)</text:p>
          </table:table-cell>
          <table:table-cell table:style-name="ce48"/>
          <table:table-cell table:style-name="ce75" table:number-columns-repeated="4"/>
          <table:table-cell table:style-name="ce89" table:formula="of:=[.C14]" office:value-type="float" office:value="300000" calcext:value-type="float">
            <text:p>300,000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 table:style-name="ce49"/>
          <table:table-cell table:style-name="ce76" table:number-columns-repeated="4"/>
          <table:table-cell table:style-name="ce90"/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Flujo de Inversiones</text:p>
          </table:table-cell>
          <table:table-cell table:style-name="ce50" table:formula="of:=SUM([.C78:.C85])" office:value-type="float" office:value="-5300000" calcext:value-type="float">
            <text:p>-5,300,000</text:p>
          </table:table-cell>
          <table:table-cell table:style-name="ce50" table:formula="of:=SUM([.D78:.D85])" office:value-type="float" office:value="-1300000" calcext:value-type="float">
            <text:p>-1,300,000</text:p>
          </table:table-cell>
          <table:table-cell table:style-name="ce50" table:formula="of:=SUM([.E78:.E85])" office:value-type="float" office:value="0" calcext:value-type="float">
            <text:p>0</text:p>
          </table:table-cell>
          <table:table-cell table:style-name="ce50" table:formula="of:=SUM([.F78:.F85])" office:value-type="float" office:value="0" calcext:value-type="float">
            <text:p>0</text:p>
          </table:table-cell>
          <table:table-cell table:style-name="ce50" table:formula="of:=SUM([.G78:.G85])" office:value-type="float" office:value="0" calcext:value-type="float">
            <text:p>0</text:p>
          </table:table-cell>
          <table:table-cell table:style-name="ce50" table:formula="of:=SUM([.H78:.H85])" office:value-type="float" office:value="4000000" calcext:value-type="float">
            <text:p>4,000,000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Costos y Gastos Operativos</text:p>
          </table:table-cell>
          <table:covered-table-cell table:number-columns-repeated="5" table:style-name="ce51"/>
          <table:covered-table-cell table:style-name="ce91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ngresos en efectivo (+)</text:p>
          </table:table-cell>
          <table:table-cell table:style-name="ce47" table:formula="of:=[.C10]" office:value-type="float" office:value="0" calcext:value-type="float">
            <text:p>0</text:p>
          </table:table-cell>
          <table:table-cell table:style-name="ce47" table:formula="of:=[.D10]" office:value-type="float" office:value="1200000" calcext:value-type="float">
            <text:p>1,200,000</text:p>
          </table:table-cell>
          <table:table-cell table:style-name="ce47" table:formula="of:=[.E10]" office:value-type="float" office:value="2400000" calcext:value-type="float">
            <text:p>2,400,000</text:p>
          </table:table-cell>
          <table:table-cell table:style-name="ce47" table:formula="of:=[.F10]" office:value-type="float" office:value="2400000" calcext:value-type="float">
            <text:p>2,400,000</text:p>
          </table:table-cell>
          <table:table-cell table:style-name="ce47" table:formula="of:=[.G10]" office:value-type="float" office:value="2400000" calcext:value-type="float">
            <text:p>2,400,000</text:p>
          </table:table-cell>
          <table:table-cell table:style-name="ce47" table:formula="of:=[.H10]" office:value-type="float" office:value="2400000" calcext:value-type="float">
            <text:p>2,40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Otros Ingresos (+)</text:p>
          </table:table-cell>
          <table:table-cell table:style-name="ce48"/>
          <table:table-cell table:style-name="ce75" table:number-columns-repeated="4"/>
          <table:table-cell table:style-name="ce89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Costos de Operación (*) (-)</text:p>
          </table:table-cell>
          <table:table-cell table:style-name="ce48"/>
          <table:table-cell table:style-name="ce75" table:formula="of:=[.D34]+[.D35]+[.D36]+[.D37]" office:value-type="float" office:value="-195000" calcext:value-type="float">
            <text:p>-195,000</text:p>
          </table:table-cell>
          <table:table-cell table:style-name="ce75" table:formula="of:=[.E34]+[.E35]+[.E36]+[.E37]" office:value-type="float" office:value="-390000" calcext:value-type="float">
            <text:p>-390,000</text:p>
          </table:table-cell>
          <table:table-cell table:style-name="ce75" table:formula="of:=[.F34]+[.F35]+[.F36]+[.F37]" office:value-type="float" office:value="-390000" calcext:value-type="float">
            <text:p>-390,000</text:p>
          </table:table-cell>
          <table:table-cell table:style-name="ce75" table:formula="of:=[.G34]+[.G35]+[.G36]+[.G37]" office:value-type="float" office:value="-390000" calcext:value-type="float">
            <text:p>-390,000</text:p>
          </table:table-cell>
          <table:table-cell table:style-name="ce75" table:formula="of:=[.H34]+[.H35]+[.H36]+[.H37]" office:value-type="float" office:value="-390000" calcext:value-type="float">
            <text:p>-39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Gastos de Administración(**)(-)</text:p>
          </table:table-cell>
          <table:table-cell table:style-name="ce48"/>
          <table:table-cell table:style-name="ce75" table:formula="of:=[.D43]" office:value-type="float" office:value="-75000" calcext:value-type="float">
            <text:p>-75,000</text:p>
          </table:table-cell>
          <table:table-cell table:style-name="ce75" table:formula="of:=[.E43]" office:value-type="float" office:value="-150000" calcext:value-type="float">
            <text:p>-150,000</text:p>
          </table:table-cell>
          <table:table-cell table:style-name="ce75" table:formula="of:=[.F43]" office:value-type="float" office:value="-150000" calcext:value-type="float">
            <text:p>-150,000</text:p>
          </table:table-cell>
          <table:table-cell table:style-name="ce75" table:formula="of:=[.G43]" office:value-type="float" office:value="-150000" calcext:value-type="float">
            <text:p>-150,000</text:p>
          </table:table-cell>
          <table:table-cell table:style-name="ce75" table:formula="of:=[.H43]" office:value-type="float" office:value="-150000" calcext:value-type="float">
            <text:p>-15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Gastos de Ventas (-)</text:p>
          </table:table-cell>
          <table:table-cell table:style-name="ce48"/>
          <table:table-cell table:style-name="ce75" table:formula="of:=[.D44]" office:value-type="float" office:value="-30000" calcext:value-type="float">
            <text:p>-30,000</text:p>
          </table:table-cell>
          <table:table-cell table:style-name="ce75" table:formula="of:=[.E44]" office:value-type="float" office:value="-60000" calcext:value-type="float">
            <text:p>-60,000</text:p>
          </table:table-cell>
          <table:table-cell table:style-name="ce75" table:formula="of:=[.F44]" office:value-type="float" office:value="-60000" calcext:value-type="float">
            <text:p>-60,000</text:p>
          </table:table-cell>
          <table:table-cell table:style-name="ce75" table:formula="of:=[.G44]" office:value-type="float" office:value="-60000" calcext:value-type="float">
            <text:p>-60,000</text:p>
          </table:table-cell>
          <table:table-cell table:style-name="ce75" table:formula="of:=[.H44]" office:value-type="float" office:value="-60000" calcext:value-type="float">
            <text:p>-60,000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mpuestos y Tributos (-)</text:p>
          </table:table-cell>
          <table:table-cell table:style-name="ce52"/>
          <table:table-cell table:style-name="ce77" table:formula="of:=[.D46]" office:value-type="float" office:value="-33932.0388349515" calcext:value-type="float">
            <text:p>-33,932</text:p>
          </table:table-cell>
          <table:table-cell table:style-name="ce77" table:formula="of:=[.E46]" office:value-type="float" office:value="-201426.147610519" calcext:value-type="float">
            <text:p>-201,426</text:p>
          </table:table-cell>
          <table:table-cell table:style-name="ce77" table:formula="of:=[.F46]" office:value-type="float" office:value="-203423.444282058" calcext:value-type="float">
            <text:p>-203,423</text:p>
          </table:table-cell>
          <table:table-cell table:style-name="ce77" table:formula="of:=[.G46]" office:value-type="float" office:value="-205362.567264134" calcext:value-type="float">
            <text:p>-205,363</text:p>
          </table:table-cell>
          <table:table-cell table:style-name="ce77" table:formula="of:=[.H46]" office:value-type="float" office:value="-165995.210936052" calcext:value-type="float">
            <text:p>-165,995</text:p>
          </table:table-cell>
          <table:table-cell table:number-columns-repeated="16376"/>
        </table:table-row>
        <table:table-row table:style-name="ro1">
          <table:table-cell/>
          <table:table-cell table:style-name="ce22" office:value-type="string" calcext:value-type="string">
            <text:p>Flujo de Caja Operativo</text:p>
          </table:table-cell>
          <table:table-cell table:style-name="ce53"/>
          <table:table-cell table:style-name="ce53" table:formula="of:=SUM([.D88:.D93])" office:value-type="float" office:value="866067.961165049" calcext:value-type="float">
            <text:p>866,068</text:p>
          </table:table-cell>
          <table:table-cell table:style-name="ce53" table:formula="of:=SUM([.E88:.E93])" office:value-type="float" office:value="1598573.85238948" calcext:value-type="float">
            <text:p>1,598,574</text:p>
          </table:table-cell>
          <table:table-cell table:style-name="ce53" table:formula="of:=SUM([.F88:.F93])" office:value-type="float" office:value="1596576.55571794" calcext:value-type="float">
            <text:p>1,596,577</text:p>
          </table:table-cell>
          <table:table-cell table:style-name="ce53" table:formula="of:=SUM([.G88:.G93])" office:value-type="float" office:value="1594637.43273587" calcext:value-type="float">
            <text:p>1,594,637</text:p>
          </table:table-cell>
          <table:table-cell table:style-name="ce53" table:formula="of:=SUM([.H88:.H93])" office:value-type="float" office:value="1634004.78906395" calcext:value-type="float">
            <text:p>1,634,005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Flujo de Caja Económico (FCE)</text:p>
          </table:table-cell>
          <table:table-cell table:style-name="ce54" table:formula="of:=[.C86]+[.C94]" office:value-type="float" office:value="-5300000" calcext:value-type="float">
            <text:p>-5,300,000.0</text:p>
          </table:table-cell>
          <table:table-cell table:style-name="ce54" table:formula="of:=[.D86]+[.D94]" office:value-type="float" office:value="-433932.038834951" calcext:value-type="float">
            <text:p>-433,932.0</text:p>
          </table:table-cell>
          <table:table-cell table:style-name="ce54" table:formula="of:=[.E86]+[.E94]" office:value-type="float" office:value="1598573.85238948" calcext:value-type="float">
            <text:p>1,598,573.9</text:p>
          </table:table-cell>
          <table:table-cell table:style-name="ce54" table:formula="of:=[.F86]+[.F94]" office:value-type="float" office:value="1596576.55571794" calcext:value-type="float">
            <text:p>1,596,576.6</text:p>
          </table:table-cell>
          <table:table-cell table:style-name="ce54" table:formula="of:=[.G86]+[.G94]" office:value-type="float" office:value="1594637.43273587" calcext:value-type="float">
            <text:p>1,594,637.4</text:p>
          </table:table-cell>
          <table:table-cell table:style-name="ce54" table:formula="of:=[.H86]+[.H94]" office:value-type="float" office:value="5634004.78906395" calcext:value-type="float">
            <text:p>5,634,004.8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Financiamiento Neto</text:p>
          </table:table-cell>
          <table:covered-table-cell table:number-columns-repeated="5" table:style-name="ce55"/>
          <table:covered-table-cell table:style-name="ce92"/>
          <table:table-cell table:number-columns-repeated="16376"/>
        </table:table-row>
        <table:table-row table:style-name="ro1">
          <table:table-cell/>
          <table:table-cell table:style-name="ce24" office:value-type="string" calcext:value-type="string">
            <text:p><text:s/>+ Préstamos</text:p>
          </table:table-cell>
          <table:table-cell table:style-name="ce56" table:formula="of:=[.C62]" office:value-type="float" office:value="3000000" calcext:value-type="float">
            <text:p>3,000,000.00</text:p>
          </table:table-cell>
          <table:table-cell table:style-name="ce78" table:number-columns-repeated="4"/>
          <table:table-cell table:style-name="ce93"/>
          <table:table-cell table:number-columns-repeated="16376"/>
        </table:table-row>
        <table:table-row table:style-name="ro1">
          <table:table-cell/>
          <table:table-cell table:style-name="ce25" office:value-type="string" calcext:value-type="string">
            <text:p><text:s/>- Amortizaciones</text:p>
          </table:table-cell>
          <table:table-cell table:style-name="ce57"/>
          <table:table-cell table:style-name="ce79" table:formula="of:=-[.D64]" office:value-type="float" office:value="-444946.657384585" calcext:value-type="float">
            <text:p>-444,946.66</text:p>
          </table:table-cell>
          <table:table-cell table:style-name="ce79" table:formula="of:=-[.E64]" office:value-type="float" office:value="-511688.655992273" calcext:value-type="float">
            <text:p>-511,688.66</text:p>
          </table:table-cell>
          <table:table-cell table:style-name="ce79" table:formula="of:=-[.F64]" office:value-type="float" office:value="-588441.954391114" calcext:value-type="float">
            <text:p>-588,441.95</text:p>
          </table:table-cell>
          <table:table-cell table:style-name="ce79" table:formula="of:=-[.G64]" office:value-type="float" office:value="-676708.247549781" calcext:value-type="float">
            <text:p>-676,708.25</text:p>
          </table:table-cell>
          <table:table-cell table:style-name="ce79" table:formula="of:=-[.H64]" office:value-type="float" office:value="-778214.484682248" calcext:value-type="float">
            <text:p>-778,214.48</text:p>
          </table:table-cell>
          <table:table-cell table:number-columns-repeated="16376"/>
        </table:table-row>
        <table:table-row table:style-name="ro1">
          <table:table-cell/>
          <table:table-cell table:style-name="ce25" office:value-type="string" calcext:value-type="string">
            <text:p><text:s/>- Intereses</text:p>
          </table:table-cell>
          <table:table-cell table:style-name="ce57"/>
          <table:table-cell table:style-name="ce79" table:formula="of:=-[.D63]" office:value-type="float" office:value="-450000" calcext:value-type="float">
            <text:p>-450,000.00</text:p>
          </table:table-cell>
          <table:table-cell table:style-name="ce79" table:formula="of:=-[.E63]" office:value-type="float" office:value="-383258.001392312" calcext:value-type="float">
            <text:p>-383,258.00</text:p>
          </table:table-cell>
          <table:table-cell table:style-name="ce79" table:formula="of:=-[.F63]" office:value-type="float" office:value="-306504.702993471" calcext:value-type="float">
            <text:p>-306,504.70</text:p>
          </table:table-cell>
          <table:table-cell table:style-name="ce79" table:formula="of:=-[.G63]" office:value-type="float" office:value="-218238.409834804" calcext:value-type="float">
            <text:p>-218,238.41</text:p>
          </table:table-cell>
          <table:table-cell table:style-name="ce79" table:formula="of:=-[.H63]" office:value-type="float" office:value="-116732.172702337" calcext:value-type="float">
            <text:p>-116,732.17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<text:s/>+ Escudo Fiscal o tributario</text:p>
          </table:table-cell>
          <table:table-cell table:style-name="ce58"/>
          <table:table-cell table:style-name="ce80" table:formula="of:=-[.D99]*0.15" office:value-type="float" office:value="67500" calcext:value-type="float">
            <text:p>67500.00</text:p>
          </table:table-cell>
          <table:table-cell table:style-name="ce80" table:formula="of:=-[.E99]*0.15" office:value-type="float" office:value="57488.7002088468" calcext:value-type="float">
            <text:p>57488.70</text:p>
          </table:table-cell>
          <table:table-cell table:style-name="ce80" table:formula="of:=-[.F99]*0.15" office:value-type="float" office:value="45975.7054490207" calcext:value-type="float">
            <text:p>45975.71</text:p>
          </table:table-cell>
          <table:table-cell table:style-name="ce80" table:formula="of:=-[.G99]*0.15" office:value-type="float" office:value="32735.7614752206" calcext:value-type="float">
            <text:p>32735.76</text:p>
          </table:table-cell>
          <table:table-cell table:style-name="ce80" table:formula="of:=-[.H99]*0.15" office:value-type="float" office:value="17509.8259053506" calcext:value-type="float">
            <text:p>17509.83</text:p>
          </table:table-cell>
          <table:table-cell table:number-columns-repeated="16376"/>
        </table:table-row>
        <table:table-row table:style-name="ro1">
          <table:table-cell/>
          <table:table-cell table:style-name="ce22" office:value-type="string" calcext:value-type="string">
            <text:p>Flujo Financiamiento Neto</text:p>
          </table:table-cell>
          <table:table-cell table:style-name="ce59" table:formula="of:=SUM([.C97:.C100])" office:value-type="float" office:value="3000000" calcext:value-type="float">
            <text:p>3,000,000.00</text:p>
          </table:table-cell>
          <table:table-cell table:style-name="ce59" table:formula="of:=SUM([.D97:.D100])" office:value-type="float" office:value="-827446.657384585" calcext:value-type="float">
            <text:p>-827,446.66</text:p>
          </table:table-cell>
          <table:table-cell table:style-name="ce59" table:formula="of:=SUM([.E97:.E100])" office:value-type="float" office:value="-837457.957175738" calcext:value-type="float">
            <text:p>-837,457.96</text:p>
          </table:table-cell>
          <table:table-cell table:style-name="ce59" table:formula="of:=SUM([.F97:.F100])" office:value-type="float" office:value="-848970.951935564" calcext:value-type="float">
            <text:p>-848,970.95</text:p>
          </table:table-cell>
          <table:table-cell table:style-name="ce59" table:formula="of:=SUM([.G97:.G100])" office:value-type="float" office:value="-862210.895909364" calcext:value-type="float">
            <text:p>-862,210.90</text:p>
          </table:table-cell>
          <table:table-cell table:style-name="ce59" table:formula="of:=SUM([.H97:.H100])" office:value-type="float" office:value="-877436.831479234" calcext:value-type="float">
            <text:p>-877,436.83</text:p>
          </table:table-cell>
          <table:table-cell table:number-columns-repeated="16376"/>
        </table:table-row>
        <table:table-row table:style-name="ro1">
          <table:table-cell/>
          <table:table-cell table:style-name="ce27" office:value-type="string" calcext:value-type="string">
            <text:p>FFN real</text:p>
          </table:table-cell>
          <table:table-cell table:style-name="ce60"/>
          <table:table-cell table:style-name="ce60" table:formula="of:=[.D101]*[.D70]" office:value-type="float" office:value="-803346.269305422" calcext:value-type="float">
            <text:p>-803,346.27</text:p>
          </table:table-cell>
          <table:table-cell table:style-name="ce60" table:formula="of:=[.E101]*[.E70]" office:value-type="float" office:value="-789384.444505362" calcext:value-type="float">
            <text:p>-789,384.44</text:p>
          </table:table-cell>
          <table:table-cell table:style-name="ce60" table:formula="of:=[.F101]*[.F70]" office:value-type="float" office:value="-776928.685696944" calcext:value-type="float">
            <text:p>-776,928.69</text:p>
          </table:table-cell>
          <table:table-cell table:style-name="ce60" table:formula="of:=[.G101]*[.G70]" office:value-type="float" office:value="-766063.213587253" calcext:value-type="float">
            <text:p>-766,063.21</text:p>
          </table:table-cell>
          <table:table-cell table:style-name="ce60" table:formula="of:=[.H101]*[.H70]" office:value-type="float" office:value="-756884.718576195" calcext:value-type="float">
            <text:p>-756,884.72</text:p>
          </table:table-cell>
          <table:table-cell table:number-columns-repeated="16376"/>
        </table:table-row>
        <table:table-row table:style-name="ro1">
          <table:table-cell/>
          <table:table-cell table:style-name="ce28" office:value-type="string" calcext:value-type="string">
            <text:p>Flujo de Caja Financiero (FCF)</text:p>
          </table:table-cell>
          <table:table-cell table:style-name="ce54" table:formula="of:=[.C95]+[.C101]" office:value-type="float" office:value="-2300000" calcext:value-type="float">
            <text:p>-2,300,000.0</text:p>
          </table:table-cell>
          <table:table-cell table:style-name="ce54" table:formula="of:=[.D95]+[.D101]" office:value-type="float" office:value="-1261378.69621954" calcext:value-type="float">
            <text:p>-1,261,378.7</text:p>
          </table:table-cell>
          <table:table-cell table:style-name="ce54" table:formula="of:=[.E95]+[.E101]" office:value-type="float" office:value="761115.895213743" calcext:value-type="float">
            <text:p>761,115.9</text:p>
          </table:table-cell>
          <table:table-cell table:style-name="ce54" table:formula="of:=[.F95]+[.F101]" office:value-type="float" office:value="747605.603782378" calcext:value-type="float">
            <text:p>747,605.6</text:p>
          </table:table-cell>
          <table:table-cell table:style-name="ce54" table:formula="of:=[.G95]+[.G101]" office:value-type="float" office:value="732426.536826502" calcext:value-type="float">
            <text:p>732,426.5</text:p>
          </table:table-cell>
          <table:table-cell table:style-name="ce54" table:formula="of:=[.H95]+[.H101]" office:value-type="float" office:value="4756567.95758471" calcext:value-type="float">
            <text:p>4,756,568.0</text:p>
          </table:table-cell>
          <table:table-cell table:number-columns-repeated="16376"/>
        </table:table-row>
        <table:table-row table:style-name="ro1">
          <table:table-cell/>
          <table:table-cell table:style-name="ce29" office:value-type="string" calcext:value-type="string">
            <text:p>(*) sin depreciaciones</text:p>
          </table:table-cell>
          <table:table-cell table:style-name="ce29" table:number-columns-repeated="6"/>
          <table:table-cell table:number-columns-repeated="16376"/>
        </table:table-row>
        <table:table-row table:style-name="ro1">
          <table:table-cell/>
          <table:table-cell table:style-name="ce29" office:value-type="string" calcext:value-type="string">
            <text:p>(**) sin amortizacion de intangibles</text:p>
          </table:table-cell>
          <table:table-cell table:style-name="ce29" table:number-columns-repeated="6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36P1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36P2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 "> </number:text>
      <number:fill-character> </number:fill-character>
      <number:number number:decimal-places="4" number:min-decimal-places="4" number:min-integer-digits="1" number:grouping="true"/>
      <number:text loext:blank-width-char=" "> </number:text>
    </number:number-style>
    <number:number-style style:name="N139P1" style:volatile="true">
      <number:text loext:blank-width-char=" "> </number:text>
      <number:fill-character> </number:fill-character>
      <number:text>-</number:text>
      <number:number number:decimal-places="4" number:min-decimal-places="4" number:min-integer-digits="1" number:grouping="true"/>
      <number:text loext:blank-width-char=" "> </number:text>
    </number:number-style>
    <number:number-style style:name="N13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lujos" style:display-name="PageStyle_fluj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onomia</meta:initial-creator>
    <dc:creator>E. Edison Achalma Mendoza</dc:creator>
    <meta:print-date>2000-01-13T20:45:18</meta:print-date>
    <meta:creation-date>1999-04-23T15:11:18</meta:creation-date>
    <dc:date>2022-07-01T18:25:08</dc:date>
    <meta:generator>LibreOffice/24.2.4.2$Linux_X86_64 LibreOffice_project/420$Build-2</meta:generator>
    <meta:document-statistic meta:table-count="1" meta:cell-count="361" meta:object-count="0"/>
    <meta:user-defined meta:name="AppVersion">16.0300</meta:user-defined>
    <meta:user-defined meta:name="Company">UNIVERSIDAD DE LOS ANDES</meta:user-defined>
  </office:meta>
</office:document-meta>
</file>