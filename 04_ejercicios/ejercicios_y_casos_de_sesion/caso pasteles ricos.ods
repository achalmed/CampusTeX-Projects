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6.348cm"/>
    </style:style>
    <style:style style:name="co3" style:family="table-column">
      <style:table-column-properties fo:break-before="auto" style:column-width="2.2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asteles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fo:border="0.74pt solid #000000" style:rotation-align="none"/>
    </style:style>
    <style:style style:name="ce2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0" style:family="table-cell" style:parent-style-name="Excel_20_Built-in_20_Comma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4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41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5" style:family="table-cell" style:parent-style-name="Default" style:data-style-name="N135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Comma" style:data-style-name="N12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0">
      <style:table-cell-properties style:rotation-align="none"/>
    </style:style>
    <style:style style:name="ce4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3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35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3" style:family="table-cell" style:parent-style-name="Default" style:data-style-name="N134">
      <style:table-cell-properties style:rotation-align="none"/>
    </style:style>
    <style:style style:name="ce5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8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9" style:family="table-cell" style:parent-style-name="Excel_20_Built-in_20_Comma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3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Excel_20_Built-in_20_Comma" style:data-style-name="N135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35">
      <style:table-cell-properties style:diagonal-bl-tr="none" style:diagonal-tl-br="none" fo:background-color="transparent" fo:border="0.74pt solid #000000" style:rotation-align="none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35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68" style:family="table-cell" style:parent-style-name="Default" style:data-style-name="N135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70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35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74" style:family="table-cell" style:parent-style-name="Default" style:data-style-name="N135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75" style:family="table-cell" style:parent-style-name="Default" style:data-style-name="N135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506cm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0.666cm" loext:decorative="false"/>
      <style:paragraph-properties style:writing-mode="lr-tb" fo:text-align="start"/>
    </style:style>
    <style:style style:name="P1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te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Default"/>
        <table:table-column table:style-name="co1" table:number-columns-repeated="16380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ASO COMPAÑÍA DE PASTELES RICOS</text:p>
          </table:table-cell>
          <table:covered-table-cell table:number-columns-repeated="2" table:style-name="ce24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UBRO</text:p>
          </table:table-cell>
          <table:table-cell table:style-name="ce25" office:value-type="string" calcext:value-type="string" table:number-columns-spanned="2" table:number-rows-spanned="1">
            <text:p>MAQUINA</text:p>
          </table:table-cell>
          <table:covered-table-cell table:style-name="ce25"/>
          <table:table-cell table:number-columns-repeated="16380"/>
        </table:table-row>
        <table:table-row table:style-name="ro1">
          <table:table-cell/>
          <table:covered-table-cell table:style-name="ce4"/>
          <table:table-cell table:style-name="ce18" office:value-type="string" calcext:value-type="string">
            <text:p>Actual</text:p>
          </table:table-cell>
          <table:table-cell table:style-name="ce54" office:value-type="string" calcext:value-type="string">
            <text:p>Nueva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Inversion inicial de la maquina</text:p>
          </table:table-cell>
          <table:table-cell table:style-name="ce26" office:value-type="float" office:value="100000" calcext:value-type="float">
            <text:p><text:s/>100,000 </text:p>
          </table:table-cell>
          <table:table-cell table:style-name="ce55" office:value-type="float" office:value="160000" calcext:value-type="float">
            <text:p><text:s/>160,000 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Precio de reventa al final de la vida util</text:p>
          </table:table-cell>
          <table:table-cell table:style-name="ce26" office:value-type="float" office:value="15000" calcext:value-type="float">
            <text:p><text:s/>15,000 </text:p>
          </table:table-cell>
          <table:table-cell table:style-name="ce55" office:value-type="float" office:value="20000" calcext:value-type="float">
            <text:p><text:s/>20,000 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Años de vida util desde la compra</text:p>
          </table:table-cell>
          <table:table-cell table:style-name="ce27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Costos de operaciones anuales</text:p>
          </table:table-cell>
          <table:table-cell table:style-name="ce28"/>
          <table:table-cell table:style-name="ce57"/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<text:s text:c="7"/>Costo variable unitario</text:p>
          </table:table-cell>
          <table:table-cell table:style-name="ce28" office:value-type="float" office:value="0.25" calcext:value-type="float">
            <text:p>0.25</text:p>
          </table:table-cell>
          <table:table-cell table:style-name="ce57" office:value-type="float" office:value="0.15" calcext:value-type="float">
            <text:p>0.15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<text:s text:c="7"/>Costo fijo total</text:p>
          </table:table-cell>
          <table:table-cell table:style-name="ce26" office:value-type="float" office:value="20000" calcext:value-type="float">
            <text:p><text:s/>20,000 </text:p>
          </table:table-cell>
          <table:table-cell table:style-name="ce55" office:value-type="float" office:value="15000" calcext:value-type="float">
            <text:p><text:s/>15,000 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Metodo de depreciacion usado</text:p>
          </table:table-cell>
          <table:table-cell table:style-name="ce27" office:value-type="string" calcext:value-type="string">
            <text:p>Lineal</text:p>
          </table:table-cell>
          <table:table-cell table:style-name="ce56" office:value-type="string" calcext:value-type="string">
            <text:p>Lineal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Tasa de impuesto a la renta</text:p>
          </table:table-cell>
          <table:table-cell table:style-name="ce29" office:value-type="percentage" office:value="0.3" calcext:value-type="percentage">
            <text:p>30 %</text:p>
          </table:table-cell>
          <table:table-cell table:style-name="ce58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Ventas anuales</text:p>
          </table:table-cell>
          <table:table-cell table:style-name="ce28"/>
          <table:table-cell table:style-name="ce57"/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Cantidad</text:p>
          </table:table-cell>
          <table:table-cell table:style-name="ce26" office:value-type="float" office:value="200000" calcext:value-type="float">
            <text:p><text:s/>200,000 </text:p>
          </table:table-cell>
          <table:table-cell table:style-name="ce55" office:value-type="float" office:value="200000" calcext:value-type="float">
            <text:p><text:s/>200,000 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Precio</text:p>
          </table:table-cell>
          <table:table-cell table:style-name="ce2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Precio de reventa de las maquinas</text:p>
          </table:table-cell>
          <table:table-cell table:style-name="ce28"/>
          <table:table-cell table:style-name="ce57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HOY</text:p>
          </table:table-cell>
          <table:table-cell table:style-name="ce26" office:value-type="float" office:value="60000" calcext:value-type="float">
            <text:p><text:s/>60,000 </text:p>
          </table:table-cell>
          <table:table-cell table:style-name="ce55" office:value-type="float" office:value="160000" calcext:value-type="float">
            <text:p><text:s/>160,000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EN 4 AÑOS</text:p>
          </table:table-cell>
          <table:table-cell table:style-name="ce30" office:value-type="float" office:value="10000" calcext:value-type="float">
            <text:p><text:s/>10,000 </text:p>
          </table:table-cell>
          <table:table-cell table:style-name="ce59" office:value-type="float" office:value="20000" calcext:value-type="float">
            <text:p><text:s/>20,000 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OPCIONES:</text:p>
          </table:table-cell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Alternativa A: Trabajar con la maquina actual</text:p>
          </table:table-cell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Alternativa B: Trabajar con la maquina nueva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orizonte de evaluacion: 4 años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etodo de evaluacion: VAN de ambas alternativas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cision: Escoger la aternativa de mayor VAN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etodos de obtencion del VAN: Existen 3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.- <text:s/>Estimar el ER ( para calcular los impuestos). Luego construi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 Flujo de Caja proyectado y obtener el VAN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2.- Construir directamente el Flujo de Caja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3.- Construir el Flujo de Caja incremental ( CON-SIN)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METODO 1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 obtiene el ER y el FC de la primera opcion ( maquina actual) 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 la segunda opcion ( maquina nueva,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OPCION A: Continuar con Maquina Actual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ER de la Maquina Actual</text:p>
          </table:table-cell>
          <table:covered-table-cell table:number-columns-repeated="5" table:style-name="ce24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Ventas netas ( 200.000x1)</text:p>
          </table:table-cell>
          <table:table-cell table:style-name="ce32"/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7" table:formula="of:=[.$C$15]*[.$C$14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Variable ( 0,25x200.000)</text:p>
          </table:table-cell>
          <table:table-cell table:style-name="ce28"/>
          <table:table-cell table:style-name="ce40" table:formula="of:=-[.$C$9]*[.$C$14]" office:value-type="float" office:value="-50000" calcext:value-type="float">
            <text:p><text:s/>(50,000)</text:p>
          </table:table-cell>
          <table:table-cell table:style-name="ce40" table:formula="of:=-[.$C$9]*[.$C$14]" office:value-type="float" office:value="-50000" calcext:value-type="float">
            <text:p><text:s/>(50,000)</text:p>
          </table:table-cell>
          <table:table-cell table:style-name="ce40" table:formula="of:=-[.$C$9]*[.$C$14]" office:value-type="float" office:value="-50000" calcext:value-type="float">
            <text:p><text:s/>(50,000)</text:p>
          </table:table-cell>
          <table:table-cell table:style-name="ce68" table:formula="of:=-[.$C$9]*[.$C$14]" office:value-type="float" office:value="-50000" calcext:value-type="float">
            <text:p><text:s/>(5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Fijos </text:p>
          </table:table-cell>
          <table:table-cell table:style-name="ce28"/>
          <table:table-cell table:style-name="ce40" table:formula="of:=-[.$C$10]" office:value-type="float" office:value="-20000" calcext:value-type="float">
            <text:p><text:s/>(20,000)</text:p>
          </table:table-cell>
          <table:table-cell table:style-name="ce40" table:formula="of:=-[.$C$10]" office:value-type="float" office:value="-20000" calcext:value-type="float">
            <text:p><text:s/>(20,000)</text:p>
          </table:table-cell>
          <table:table-cell table:style-name="ce40" table:formula="of:=-[.$C$10]" office:value-type="float" office:value="-20000" calcext:value-type="float">
            <text:p><text:s/>(20,000)</text:p>
          </table:table-cell>
          <table:table-cell table:style-name="ce68" table:formula="of:=-[.$C$10]" office:value-type="float" office:value="-20000" calcext:value-type="float">
            <text:p><text:s/>(2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preciaciones (*)</text:p>
          </table:table-cell>
          <table:table-cell table:style-name="ce28"/>
          <table:table-cell table:style-name="ce40" table:formula="of:=-[.$C$56]" office:value-type="float" office:value="-15000" calcext:value-type="float">
            <text:p><text:s/>(15,000)</text:p>
          </table:table-cell>
          <table:table-cell table:style-name="ce28" table:formula="of:=-[.$C$56]" office:value-type="float" office:value="-15000" calcext:value-type="float">
            <text:p>-15000</text:p>
          </table:table-cell>
          <table:table-cell table:style-name="ce28" table:formula="of:=-[.$C$56]" office:value-type="float" office:value="-15000" calcext:value-type="float">
            <text:p>-15000</text:p>
          </table:table-cell>
          <table:table-cell table:style-name="ce57" table:formula="of:=-[.$C$56]" office:value-type="float" office:value="-15000" calcext:value-type="float">
            <text:p>-15000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Ganancia de venta de Activo Fijo (**)</text:p>
          </table:table-cell>
          <table:table-cell table:style-name="ce28" table:number-columns-repeated="4"/>
          <table:table-cell table:style-name="ce68" table:formula="of:=[.C58]" office:value-type="float" office:value="5000" calcext:value-type="float">
            <text:p><text:s/>5,000 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Utilidad antes de impuestos</text:p>
          </table:table-cell>
          <table:table-cell table:style-name="ce28" table:formula="of:=SUM([.C48:.C52])" office:value-type="float" office:value="0" calcext:value-type="float">
            <text:p>0</text:p>
          </table:table-cell>
          <table:table-cell table:style-name="ce40" table:formula="of:=SUM([.D48:.D52])" office:value-type="float" office:value="115000" calcext:value-type="float">
            <text:p><text:s/>115,000 </text:p>
          </table:table-cell>
          <table:table-cell table:style-name="ce40" table:formula="of:=SUM([.E48:.E52])" office:value-type="float" office:value="115000" calcext:value-type="float">
            <text:p><text:s/>115,000 </text:p>
          </table:table-cell>
          <table:table-cell table:style-name="ce28" table:formula="of:=SUM([.F48:.F52])" office:value-type="float" office:value="115000" calcext:value-type="float">
            <text:p>115000</text:p>
          </table:table-cell>
          <table:table-cell table:style-name="ce57" table:formula="of:=SUM([.G48:.G52])" office:value-type="float" office:value="120000" calcext:value-type="float">
            <text:p>12000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>
            <text:p>Impuestos</text:p>
          </table:table-cell>
          <table:table-cell table:style-name="ce33" table:formula="of:=-[.C53]*[.$C$12]" office:value-type="float" office:value="0" calcext:value-type="float">
            <text:p>0</text:p>
          </table:table-cell>
          <table:table-cell table:style-name="ce33" table:formula="of:=-[.D53]*[.$C$12]" office:value-type="float" office:value="-34500" calcext:value-type="float">
            <text:p>-34500</text:p>
          </table:table-cell>
          <table:table-cell table:style-name="ce33" table:formula="of:=-[.E53]*[.$C$12]" office:value-type="float" office:value="-34500" calcext:value-type="float">
            <text:p>-34500</text:p>
          </table:table-cell>
          <table:table-cell table:style-name="ce33" table:formula="of:=-[.F53]*[.$C$12]" office:value-type="float" office:value="-34500" calcext:value-type="float">
            <text:p>-34500</text:p>
          </table:table-cell>
          <table:table-cell table:style-name="ce69" table:formula="of:=-[.G53]*[.$C$12]" office:value-type="float" office:value="-36000" calcext:value-type="float">
            <text:p>-3600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Utilidad Neta</text:p>
          </table:table-cell>
          <table:table-cell table:style-name="ce34" table:formula="of:=[.C53]+[.C54]" office:value-type="float" office:value="0" calcext:value-type="float">
            <text:p>0</text:p>
          </table:table-cell>
          <table:table-cell table:style-name="ce34" table:formula="of:=[.D53]+[.D54]" office:value-type="float" office:value="80500" calcext:value-type="float">
            <text:p>80500</text:p>
          </table:table-cell>
          <table:table-cell table:style-name="ce34" table:formula="of:=[.E53]+[.E54]" office:value-type="float" office:value="80500" calcext:value-type="float">
            <text:p>80500</text:p>
          </table:table-cell>
          <table:table-cell table:style-name="ce34" table:formula="of:=[.F53]+[.F54]" office:value-type="float" office:value="80500" calcext:value-type="float">
            <text:p>80500</text:p>
          </table:table-cell>
          <table:table-cell table:style-name="ce70" table:formula="of:=[.G53]+[.G54]" office:value-type="float" office:value="84000" calcext:value-type="float">
            <text:p>84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) Vd = (Vc-Vr)/n=</text:p>
          </table:table-cell>
          <table:table-cell table:style-name="ce35" table:formula="of:=([.C5]-[.C18])/[.C7]" office:value-type="float" office:value="15000" calcext:value-type="float">
            <text:p><text:s/>15,000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(**) Ganancia = Valor comercial - Valor en libros ( residual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6"/>Ganancia = 15000- 10000 = </text:p>
          </table:table-cell>
          <table:table-cell table:style-name="ce36" table:formula="of:=[.C6]-[.C18]" office:value-type="float" office:value="5000" calcext:value-type="float">
            <text:p><text:s/>5,000 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ra elaborar el Flujo de Caja observamos que la venta de 15.000 son una entrada en efectivo, mas no los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0.000 de valor en libros o valor residual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simismo, la compra de la maquina actual se realizo hace 2 años, por lo que es un costo historico que n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terviene en nuestro analisis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depreciacion, debido a que es una gastos que no genera salida de efectivo no se considera en el FC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FC de la Maquina Actual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Ventas netas ( 200.000x1)</text:p>
          </table:table-cell>
          <table:table-cell table:style-name="ce32" table:formula="of:=SUM([.C68])" office:value-type="float" office:value="0" calcext:value-type="float">
            <text:p>0</text:p>
          </table:table-cell>
          <table:table-cell table:style-name="ce60" table:formula="of:=[.D48]" office:value-type="float" office:value="200000" calcext:value-type="float">
            <text:p><text:s/>200,000 </text:p>
          </table:table-cell>
          <table:table-cell table:style-name="ce60" table:formula="of:=[.E48]" office:value-type="float" office:value="200000" calcext:value-type="float">
            <text:p><text:s/>200,000 </text:p>
          </table:table-cell>
          <table:table-cell table:style-name="ce60" table:formula="of:=[.F48]" office:value-type="float" office:value="200000" calcext:value-type="float">
            <text:p><text:s/>200,000 </text:p>
          </table:table-cell>
          <table:table-cell table:style-name="ce60" table:formula="of:=[.G48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Variable ( 0,25x200.000)</text:p>
          </table:table-cell>
          <table:table-cell table:style-name="ce28" table:formula="of:=SUM([.C69])" office:value-type="float" office:value="0" calcext:value-type="float">
            <text:p>0</text:p>
          </table:table-cell>
          <table:table-cell table:style-name="ce40" table:formula="of:=[.D49]" office:value-type="float" office:value="-50000" calcext:value-type="float">
            <text:p><text:s/>(50,000)</text:p>
          </table:table-cell>
          <table:table-cell table:style-name="ce40" table:formula="of:=[.E49]" office:value-type="float" office:value="-50000" calcext:value-type="float">
            <text:p><text:s/>(50,000)</text:p>
          </table:table-cell>
          <table:table-cell table:style-name="ce40" table:formula="of:=[.F49]" office:value-type="float" office:value="-50000" calcext:value-type="float">
            <text:p><text:s/>(50,000)</text:p>
          </table:table-cell>
          <table:table-cell table:style-name="ce40" table:formula="of:=[.G49]" office:value-type="float" office:value="-50000" calcext:value-type="float">
            <text:p><text:s/>(5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Fijos </text:p>
          </table:table-cell>
          <table:table-cell table:style-name="ce28" table:formula="of:=SUM([.C70])" office:value-type="float" office:value="0" calcext:value-type="float">
            <text:p>0</text:p>
          </table:table-cell>
          <table:table-cell table:style-name="ce40" table:formula="of:=[.D50]" office:value-type="float" office:value="-20000" calcext:value-type="float">
            <text:p><text:s/>(20,000)</text:p>
          </table:table-cell>
          <table:table-cell table:style-name="ce40" table:formula="of:=[.E50]" office:value-type="float" office:value="-20000" calcext:value-type="float">
            <text:p><text:s/>(20,000)</text:p>
          </table:table-cell>
          <table:table-cell table:style-name="ce40" table:formula="of:=[.F50]" office:value-type="float" office:value="-20000" calcext:value-type="float">
            <text:p><text:s/>(20,000)</text:p>
          </table:table-cell>
          <table:table-cell table:style-name="ce40" table:formula="of:=[.G50]" office:value-type="float" office:value="-20000" calcext:value-type="float">
            <text:p><text:s/>(2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Impuestos</text:p>
          </table:table-cell>
          <table:table-cell table:style-name="ce28" table:formula="of:=SUM([.C71])" office:value-type="float" office:value="0" calcext:value-type="float">
            <text:p>0</text:p>
          </table:table-cell>
          <table:table-cell table:style-name="ce28" table:formula="of:=[.D54]" office:value-type="float" office:value="-34500" calcext:value-type="float">
            <text:p>-34500</text:p>
          </table:table-cell>
          <table:table-cell table:style-name="ce28" table:formula="of:=[.E54]" office:value-type="float" office:value="-34500" calcext:value-type="float">
            <text:p>-34500</text:p>
          </table:table-cell>
          <table:table-cell table:style-name="ce28" table:formula="of:=[.F54]" office:value-type="float" office:value="-34500" calcext:value-type="float">
            <text:p>-34500</text:p>
          </table:table-cell>
          <table:table-cell table:style-name="ce28" table:formula="of:=[.G54]" office:value-type="float" office:value="-36000" calcext:value-type="float">
            <text:p>-36000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Venta de Activos Fijos</text:p>
          </table:table-cell>
          <table:table-cell table:style-name="ce28" table:formula="of:=SUM([.C72])" office:value-type="float" office:value="0" calcext:value-type="float">
            <text:p>0</text:p>
          </table:table-cell>
          <table:table-cell table:style-name="ce28" table:number-columns-repeated="3"/>
          <table:table-cell table:style-name="ce68" table:formula="of:=[.C6]" office:value-type="float" office:value="15000" calcext:value-type="float">
            <text:p><text:s/>15,000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FNC</text:p>
          </table:table-cell>
          <table:table-cell table:style-name="ce34" office:value-type="float" office:value="0" calcext:value-type="float">
            <text:p>0</text:p>
          </table:table-cell>
          <table:table-cell table:style-name="ce61" table:formula="of:=SUM([.D69:.D73])" office:value-type="float" office:value="95500" calcext:value-type="float">
            <text:p><text:s/>95,500 </text:p>
          </table:table-cell>
          <table:table-cell table:style-name="ce61" table:formula="of:=SUM([.E69:.E73])" office:value-type="float" office:value="95500" calcext:value-type="float">
            <text:p><text:s/>95,500 </text:p>
          </table:table-cell>
          <table:table-cell table:style-name="ce61" table:formula="of:=SUM([.F69:.F73])" office:value-type="float" office:value="95500" calcext:value-type="float">
            <text:p><text:s/>95,500 </text:p>
          </table:table-cell>
          <table:table-cell table:style-name="ce61" table:formula="of:=SUM([.G69:.G73])" office:value-type="float" office:value="109000" calcext:value-type="float">
            <text:p><text:s/>109,000 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 COK =</text:p>
          </table:table-cell>
          <table:table-cell table:style-name="ce37" office:value-type="percentage" office:value="0.2" calcext:value-type="percentage">
            <office:annotation draw:style-name="gr1" draw:text-style-name="P1" svg:width="3.932cm" svg:height="7.706cm" svg:x="11.129cm" svg:y="33.469cm" draw:caption-point-x="-0.407cm" draw:caption-point-y="0.275cm">
              <dc:creator>Edison Achalma Mendoza</dc:creator>
              <dc:date>2024-07-31T03:25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Tasa de descuento</text:p>
            </office:annotation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VAN =</text:p>
          </table:table-cell>
          <table:table-cell table:style-name="ce38" table:formula="of:=NPV([.C76];[.D74:.G74])+[.C74]" office:value-type="float" office:value="253734.567901235" calcext:value-type="float">
            <text:p>$253,734.57 </text:p>
          </table:table-cell>
          <table:table-cell table:style-name="ce53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OPCION B: Comprar una Maquina Nueva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14" office:value-type="string" calcext:value-type="string" table:number-columns-spanned="6" table:number-rows-spanned="1">
            <text:p>ER de la Maquina Nueva</text:p>
          </table:table-cell>
          <table:covered-table-cell table:number-columns-repeated="5" table:style-name="ce39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Ventas netas ( 200.000x1)</text:p>
          </table:table-cell>
          <table:table-cell table:style-name="ce32"/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0" table:formula="of:=[.$C$15]*[.$C$14]" office:value-type="float" office:value="200000" calcext:value-type="float">
            <text:p><text:s/>200,000 </text:p>
          </table:table-cell>
          <table:table-cell table:style-name="ce67" table:formula="of:=[.$C$15]*[.$C$14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Variable ( 0,15x200.000)</text:p>
          </table:table-cell>
          <table:table-cell table:style-name="ce28"/>
          <table:table-cell table:style-name="ce40" table:formula="of:=-[.$D$9]*[.$D$14]" office:value-type="float" office:value="-30000" calcext:value-type="float">
            <text:p><text:s/>(30,000)</text:p>
          </table:table-cell>
          <table:table-cell table:style-name="ce40" table:formula="of:=-[.$D$9]*[.$D$14]" office:value-type="float" office:value="-30000" calcext:value-type="float">
            <text:p><text:s/>(30,000)</text:p>
          </table:table-cell>
          <table:table-cell table:style-name="ce40" table:formula="of:=-[.$D$9]*[.$D$14]" office:value-type="float" office:value="-30000" calcext:value-type="float">
            <text:p><text:s/>(30,000)</text:p>
          </table:table-cell>
          <table:table-cell table:style-name="ce40" table:formula="of:=-[.$D$9]*[.$D$14]" office:value-type="float" office:value="-30000" calcext:value-type="float">
            <text:p><text:s/>(3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Fijos </text:p>
          </table:table-cell>
          <table:table-cell table:style-name="ce28"/>
          <table:table-cell table:style-name="ce40" table:formula="of:=-[.$D$10]" office:value-type="float" office:value="-15000" calcext:value-type="float">
            <text:p><text:s/>(15,000)</text:p>
          </table:table-cell>
          <table:table-cell table:style-name="ce40" table:formula="of:=-[.$D$10]" office:value-type="float" office:value="-15000" calcext:value-type="float">
            <text:p><text:s/>(15,000)</text:p>
          </table:table-cell>
          <table:table-cell table:style-name="ce40" table:formula="of:=-[.$D$10]" office:value-type="float" office:value="-15000" calcext:value-type="float">
            <text:p><text:s/>(15,000)</text:p>
          </table:table-cell>
          <table:table-cell table:style-name="ce40" table:formula="of:=-[.$D$10]" office:value-type="float" office:value="-15000" calcext:value-type="float">
            <text:p><text:s/>(15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preciaciones (*)</text:p>
          </table:table-cell>
          <table:table-cell table:style-name="ce28"/>
          <table:table-cell table:style-name="ce40" table:formula="of:=-[.$C$93]" office:value-type="float" office:value="-35000" calcext:value-type="float">
            <text:p><text:s/>(35,000)</text:p>
          </table:table-cell>
          <table:table-cell table:style-name="ce40" table:formula="of:=-[.$C$93]" office:value-type="float" office:value="-35000" calcext:value-type="float">
            <text:p><text:s/>(35,000)</text:p>
          </table:table-cell>
          <table:table-cell table:style-name="ce40" table:formula="of:=-[.$C$93]" office:value-type="float" office:value="-35000" calcext:value-type="float">
            <text:p><text:s/>(35,000)</text:p>
          </table:table-cell>
          <table:table-cell table:style-name="ce40" table:formula="of:=-[.$C$93]" office:value-type="float" office:value="-35000" calcext:value-type="float">
            <text:p><text:s/>(35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Perdida de venta de Activo Fijo (**)</text:p>
          </table:table-cell>
          <table:table-cell table:style-name="ce40" table:formula="of:=[.C95]" office:value-type="float" office:value="-10000" calcext:value-type="float">
            <text:p><text:s/>(10,000)</text:p>
          </table:table-cell>
          <table:table-cell table:style-name="ce28" table:number-columns-repeated="3"/>
          <table:table-cell table:style-name="ce68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Utilidad antes de impuestos</text:p>
          </table:table-cell>
          <table:table-cell table:style-name="ce28" table:formula="of:=SUM([.C85:.C89])" office:value-type="float" office:value="-10000" calcext:value-type="float">
            <text:p>-10000</text:p>
          </table:table-cell>
          <table:table-cell table:style-name="ce28" table:formula="of:=SUM([.D85:.D89])" office:value-type="float" office:value="120000" calcext:value-type="float">
            <text:p>120000</text:p>
          </table:table-cell>
          <table:table-cell table:style-name="ce28" table:formula="of:=SUM([.E85:.E89])" office:value-type="float" office:value="120000" calcext:value-type="float">
            <text:p>120000</text:p>
          </table:table-cell>
          <table:table-cell table:style-name="ce28" table:formula="of:=SUM([.F85:.F89])" office:value-type="float" office:value="120000" calcext:value-type="float">
            <text:p>120000</text:p>
          </table:table-cell>
          <table:table-cell table:style-name="ce57" table:formula="of:=SUM([.G85:.G89])" office:value-type="float" office:value="120000" calcext:value-type="float">
            <text:p>12000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>
            <text:p>Impuestos</text:p>
          </table:table-cell>
          <table:table-cell table:style-name="ce33" table:formula="of:=-[.C90]*[.D12]" office:value-type="float" office:value="3000" calcext:value-type="float">
            <text:p>3000</text:p>
          </table:table-cell>
          <table:table-cell table:style-name="ce33" table:formula="of:=-[.D90]*[.$C$12]" office:value-type="float" office:value="-36000" calcext:value-type="float">
            <text:p>-36000</text:p>
          </table:table-cell>
          <table:table-cell table:style-name="ce33" table:formula="of:=-[.E90]*[.$C$12]" office:value-type="float" office:value="-36000" calcext:value-type="float">
            <text:p>-36000</text:p>
          </table:table-cell>
          <table:table-cell table:style-name="ce33" table:formula="of:=-[.F90]*[.$C$12]" office:value-type="float" office:value="-36000" calcext:value-type="float">
            <text:p>-36000</text:p>
          </table:table-cell>
          <table:table-cell table:style-name="ce69" table:formula="of:=-[.G90]*[.$C$12]" office:value-type="float" office:value="-36000" calcext:value-type="float">
            <text:p>-3600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Utilidad Neta</text:p>
          </table:table-cell>
          <table:table-cell table:style-name="ce34"/>
          <table:table-cell table:style-name="ce34" table:formula="of:=[.D90]+[.D91]" office:value-type="float" office:value="84000" calcext:value-type="float">
            <text:p>84000</text:p>
          </table:table-cell>
          <table:table-cell table:style-name="ce34" table:formula="of:=[.E90]+[.E91]" office:value-type="float" office:value="84000" calcext:value-type="float">
            <text:p>84000</text:p>
          </table:table-cell>
          <table:table-cell table:style-name="ce34" table:formula="of:=[.F90]+[.F91]" office:value-type="float" office:value="84000" calcext:value-type="float">
            <text:p>84000</text:p>
          </table:table-cell>
          <table:table-cell table:style-name="ce70" table:formula="of:=[.G90]+[.G91]" office:value-type="float" office:value="84000" calcext:value-type="float">
            <text:p>84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) Vd = (Vc-Vr)/n= (160000-20000)/4</text:p>
          </table:table-cell>
          <table:table-cell table:style-name="ce35" table:formula="of:=([.D5]-[.D18])/[.D7]" office:value-type="float" office:value="35000" calcext:value-type="float">
            <text:p><text:s/>35,000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(**) Perdida = Valor comercial - Valor en libros = (60.000-(100.000-30.000)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5"/>Perdida = 60.000- 70000 = </text:p>
          </table:table-cell>
          <table:table-cell table:style-name="ce35" office:value-type="float" office:value="-10000" calcext:value-type="float">
            <text:p><text:s/>(10,000)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ra elaborar el Flujo de Caja observamos que la venta de 20.000 son una entrada en efectivo, mas no los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20.000 de valor en libros o valor residual de la maquina nueva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simismo, la venta de la maquina actual es un ingreso, y la perdida por la venta origina un escudo fisc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 que se registra como ingreso en el momento cer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 depreciacion, debido a que es un gasto que no genera salido de efectivo no se considera en el FC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14" office:value-type="string" calcext:value-type="string" table:number-columns-spanned="6" table:number-rows-spanned="1">
            <text:p>FC de la Maquina Nueva</text:p>
          </table:table-cell>
          <table:covered-table-cell table:number-columns-repeated="5" table:style-name="ce39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>
            <text:p>Ingreso por venta de maquina actual</text:p>
          </table:table-cell>
          <table:table-cell table:style-name="ce41" table:formula="of:=[.C17]" office:value-type="float" office:value="60000" calcext:value-type="float">
            <text:p><text:s/>60,000 </text:p>
          </table:table-cell>
          <table:table-cell table:style-name="ce62" table:number-columns-repeated="3"/>
          <table:table-cell table:style-name="ce71"/>
          <table:table-cell table:number-columns-repeated="16377"/>
        </table:table-row>
        <table:table-row table:style-name="ro1">
          <table:table-cell/>
          <table:table-cell table:style-name="ce16" office:value-type="string" calcext:value-type="string">
            <text:p>Escudo Fiscal por perdida AF</text:p>
          </table:table-cell>
          <table:table-cell table:style-name="ce42" table:formula="of:=[.C91]" office:value-type="float" office:value="3000" calcext:value-type="float">
            <text:p><text:s/>3,000 </text:p>
          </table:table-cell>
          <table:table-cell table:style-name="ce63" table:number-columns-repeated="3"/>
          <table:table-cell table:style-name="ce72"/>
          <table:table-cell table:number-columns-repeated="16377"/>
        </table:table-row>
        <table:table-row table:style-name="ro1">
          <table:table-cell/>
          <table:table-cell table:style-name="ce16" office:value-type="string" calcext:value-type="string">
            <text:p>Compra de maquina nueva</text:p>
          </table:table-cell>
          <table:table-cell table:style-name="ce43" table:formula="of:=-[.D5]" office:value-type="float" office:value="-160000" calcext:value-type="float">
            <text:p><text:s/>(160,000)</text:p>
          </table:table-cell>
          <table:table-cell table:style-name="ce63" table:number-columns-repeated="3"/>
          <table:table-cell table:style-name="ce72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Ventas netas ( 200.000x1)</text:p>
          </table:table-cell>
          <table:table-cell table:style-name="ce44" table:formula="of:=SUM([.C105])" office:value-type="float" office:value="0" calcext:value-type="float">
            <text:p>0</text:p>
          </table:table-cell>
          <table:table-cell table:style-name="ce64" table:formula="of:=[.D85]" office:value-type="float" office:value="200000" calcext:value-type="float">
            <text:p><text:s/>200,000 </text:p>
          </table:table-cell>
          <table:table-cell table:style-name="ce64" table:formula="of:=[.E85]" office:value-type="float" office:value="200000" calcext:value-type="float">
            <text:p><text:s/>200,000 </text:p>
          </table:table-cell>
          <table:table-cell table:style-name="ce64" table:formula="of:=[.F85]" office:value-type="float" office:value="200000" calcext:value-type="float">
            <text:p><text:s/>200,000 </text:p>
          </table:table-cell>
          <table:table-cell table:style-name="ce73" table:formula="of:=[.G85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Variable ( 0,15x200.000)</text:p>
          </table:table-cell>
          <table:table-cell table:style-name="ce28" table:formula="of:=SUM([.C109])" office:value-type="float" office:value="0" calcext:value-type="float">
            <text:p>0</text:p>
          </table:table-cell>
          <table:table-cell table:style-name="ce40" table:formula="of:=[.D86]" office:value-type="float" office:value="-30000" calcext:value-type="float">
            <text:p><text:s/>(30,000)</text:p>
          </table:table-cell>
          <table:table-cell table:style-name="ce40" table:formula="of:=[.E86]" office:value-type="float" office:value="-30000" calcext:value-type="float">
            <text:p><text:s/>(30,000)</text:p>
          </table:table-cell>
          <table:table-cell table:style-name="ce40" table:formula="of:=[.F86]" office:value-type="float" office:value="-30000" calcext:value-type="float">
            <text:p><text:s/>(30,000)</text:p>
          </table:table-cell>
          <table:table-cell table:style-name="ce68" table:formula="of:=[.G86]" office:value-type="float" office:value="-30000" calcext:value-type="float">
            <text:p><text:s/>(30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stos Fijos </text:p>
          </table:table-cell>
          <table:table-cell table:style-name="ce28" table:formula="of:=SUM([.C110])" office:value-type="float" office:value="0" calcext:value-type="float">
            <text:p>0</text:p>
          </table:table-cell>
          <table:table-cell table:style-name="ce40" table:formula="of:=[.D87]" office:value-type="float" office:value="-15000" calcext:value-type="float">
            <text:p><text:s/>(15,000)</text:p>
          </table:table-cell>
          <table:table-cell table:style-name="ce40" table:formula="of:=[.E87]" office:value-type="float" office:value="-15000" calcext:value-type="float">
            <text:p><text:s/>(15,000)</text:p>
          </table:table-cell>
          <table:table-cell table:style-name="ce40" table:formula="of:=[.F87]" office:value-type="float" office:value="-15000" calcext:value-type="float">
            <text:p><text:s/>(15,000)</text:p>
          </table:table-cell>
          <table:table-cell table:style-name="ce68" table:formula="of:=[.G87]" office:value-type="float" office:value="-15000" calcext:value-type="float">
            <text:p><text:s/>(15,000)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Impuestos</text:p>
          </table:table-cell>
          <table:table-cell table:style-name="ce28" table:formula="of:=SUM([.C111])" office:value-type="float" office:value="0" calcext:value-type="float">
            <text:p>0</text:p>
          </table:table-cell>
          <table:table-cell table:style-name="ce28" table:formula="of:=[.D91]" office:value-type="float" office:value="-36000" calcext:value-type="float">
            <text:p>-36000</text:p>
          </table:table-cell>
          <table:table-cell table:style-name="ce28" table:formula="of:=[.E91]" office:value-type="float" office:value="-36000" calcext:value-type="float">
            <text:p>-36000</text:p>
          </table:table-cell>
          <table:table-cell table:style-name="ce28" table:formula="of:=[.F91]" office:value-type="float" office:value="-36000" calcext:value-type="float">
            <text:p>-36000</text:p>
          </table:table-cell>
          <table:table-cell table:style-name="ce57" table:formula="of:=[.G91]" office:value-type="float" office:value="-36000" calcext:value-type="float">
            <text:p>-36000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Venta de maquina nueva</text:p>
          </table:table-cell>
          <table:table-cell table:style-name="ce28" table:formula="of:=SUM([.C112])" office:value-type="float" office:value="0" calcext:value-type="float">
            <text:p>0</text:p>
          </table:table-cell>
          <table:table-cell table:style-name="ce28" table:number-columns-repeated="3"/>
          <table:table-cell table:style-name="ce68" table:formula="of:=[.D18]" office:value-type="float" office:value="20000" calcext:value-type="float">
            <text:p><text:s/>20,000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AFN</text:p>
          </table:table-cell>
          <table:table-cell table:style-name="ce45" table:formula="of:=SUM([.C106:.C113])" office:value-type="float" office:value="-97000" calcext:value-type="float">
            <text:p><text:s/>(97,000)</text:p>
          </table:table-cell>
          <table:table-cell table:style-name="ce45" table:formula="of:=SUM([.D106:.D113])" office:value-type="float" office:value="119000" calcext:value-type="float">
            <text:p><text:s/>119,000 </text:p>
          </table:table-cell>
          <table:table-cell table:style-name="ce45" table:formula="of:=SUM([.E106:.E113])" office:value-type="float" office:value="119000" calcext:value-type="float">
            <text:p><text:s/>119,000 </text:p>
          </table:table-cell>
          <table:table-cell table:style-name="ce45" table:formula="of:=SUM([.F106:.F113])" office:value-type="float" office:value="119000" calcext:value-type="float">
            <text:p><text:s/>119,000 </text:p>
          </table:table-cell>
          <table:table-cell table:style-name="ce45" table:formula="of:=SUM([.G106:.G113])" office:value-type="float" office:value="139000" calcext:value-type="float">
            <text:p><text:s/>139,000 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 COK =</text:p>
          </table:table-cell>
          <table:table-cell table:style-name="ce46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VAN =</text:p>
          </table:table-cell>
          <table:table-cell table:style-name="ce47" table:formula="of:=NPV([.C116];[.D114:.G114])+[.C114]" office:value-type="float" office:value="220704.475308642" calcext:value-type="float">
            <text:p><text:s/>220,704.48 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METODO II: ESTIMACION DIRECTA DEL FLUJO DE CAJA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OPCION A: </text:p>
          </table:table-cell>
          <table:table-cell table:number-columns-repeated="16382"/>
        </table:table-row>
        <table:table-row table:style-name="ro2">
          <table:table-cell/>
          <table:table-cell table:style-name="ce14" office:value-type="string" calcext:value-type="string" table:number-columns-spanned="6" table:number-rows-spanned="1">
            <text:p>flujo de caja de la Maquina Actual</text:p>
          </table:table-cell>
          <table:covered-table-cell table:number-columns-repeated="5" table:style-name="ce39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" office:value-type="string" calcext:value-type="string">
            <text:p>RUBR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Ventas</text:p>
          </table:table-cell>
          <table:table-cell table:style-name="ce28"/>
          <table:table-cell table:style-name="ce40" table:formula="of:=[.D69]" office:value-type="float" office:value="200000" calcext:value-type="float">
            <text:p><text:s/>200,000 </text:p>
          </table:table-cell>
          <table:table-cell table:style-name="ce40" table:formula="of:=[.E69]" office:value-type="float" office:value="200000" calcext:value-type="float">
            <text:p><text:s/>200,000 </text:p>
          </table:table-cell>
          <table:table-cell table:style-name="ce40" table:formula="of:=[.F69]" office:value-type="float" office:value="200000" calcext:value-type="float">
            <text:p><text:s/>200,000 </text:p>
          </table:table-cell>
          <table:table-cell table:style-name="ce40" table:formula="of:=[.G69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Impuesto por ventas</text:p>
          </table:table-cell>
          <table:table-cell table:style-name="ce28"/>
          <table:table-cell table:style-name="ce40" table:formula="of:=-[.D126]*[.$C$136]" office:value-type="float" office:value="-60000" calcext:value-type="float">
            <text:p><text:s/>(60,000)</text:p>
          </table:table-cell>
          <table:table-cell table:style-name="ce40" table:formula="of:=-[.E126]*[.$C$136]" office:value-type="float" office:value="-60000" calcext:value-type="float">
            <text:p><text:s/>(60,000)</text:p>
          </table:table-cell>
          <table:table-cell table:style-name="ce40" table:formula="of:=-[.F126]*[.$C$136]" office:value-type="float" office:value="-60000" calcext:value-type="float">
            <text:p><text:s/>(60,000)</text:p>
          </table:table-cell>
          <table:table-cell table:style-name="ce40" table:formula="of:=-[.G126]*[.$C$136]" office:value-type="float" office:value="-60000" calcext:value-type="float">
            <text:p><text:s/>(60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Costos Variables</text:p>
          </table:table-cell>
          <table:table-cell table:style-name="ce28"/>
          <table:table-cell table:style-name="ce40" table:formula="of:=[.D49]" office:value-type="float" office:value="-50000" calcext:value-type="float">
            <text:p><text:s/>(50,000)</text:p>
          </table:table-cell>
          <table:table-cell table:style-name="ce40" table:formula="of:=[.E49]" office:value-type="float" office:value="-50000" calcext:value-type="float">
            <text:p><text:s/>(50,000)</text:p>
          </table:table-cell>
          <table:table-cell table:style-name="ce40" table:formula="of:=[.F49]" office:value-type="float" office:value="-50000" calcext:value-type="float">
            <text:p><text:s/>(50,000)</text:p>
          </table:table-cell>
          <table:table-cell table:style-name="ce40" table:formula="of:=[.G49]" office:value-type="float" office:value="-50000" calcext:value-type="float">
            <text:p><text:s/>(50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costos variables</text:p>
          </table:table-cell>
          <table:table-cell table:style-name="ce28"/>
          <table:table-cell table:style-name="ce40" table:formula="of:=-[.D128]*[.$C$136]" office:value-type="float" office:value="15000" calcext:value-type="float">
            <text:p><text:s/>15,000 </text:p>
          </table:table-cell>
          <table:table-cell table:style-name="ce40" table:formula="of:=-[.E128]*[.$C$136]" office:value-type="float" office:value="15000" calcext:value-type="float">
            <text:p><text:s/>15,000 </text:p>
          </table:table-cell>
          <table:table-cell table:style-name="ce40" table:formula="of:=-[.F128]*[.$C$136]" office:value-type="float" office:value="15000" calcext:value-type="float">
            <text:p><text:s/>15,000 </text:p>
          </table:table-cell>
          <table:table-cell table:style-name="ce40" table:formula="of:=-[.G128]*[.$C$136]" office:value-type="float" office:value="15000" calcext:value-type="float">
            <text:p><text:s/>15,0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Costos Fijos</text:p>
          </table:table-cell>
          <table:table-cell table:style-name="ce28"/>
          <table:table-cell table:style-name="ce40" table:formula="of:=[.D50]" office:value-type="float" office:value="-20000" calcext:value-type="float">
            <text:p><text:s/>(20,000)</text:p>
          </table:table-cell>
          <table:table-cell table:style-name="ce40" table:formula="of:=[.E50]" office:value-type="float" office:value="-20000" calcext:value-type="float">
            <text:p><text:s/>(20,000)</text:p>
          </table:table-cell>
          <table:table-cell table:style-name="ce40" table:formula="of:=[.F50]" office:value-type="float" office:value="-20000" calcext:value-type="float">
            <text:p><text:s/>(20,000)</text:p>
          </table:table-cell>
          <table:table-cell table:style-name="ce40" table:formula="of:=[.G50]" office:value-type="float" office:value="-20000" calcext:value-type="float">
            <text:p><text:s/>(20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costos fijos</text:p>
          </table:table-cell>
          <table:table-cell table:style-name="ce28"/>
          <table:table-cell table:style-name="ce28" table:formula="of:=-[.D130]*[.$C$136]" office:value-type="float" office:value="6000" calcext:value-type="float">
            <text:p>6000</text:p>
          </table:table-cell>
          <table:table-cell table:style-name="ce28" table:formula="of:=-[.E130]*[.$C$136]" office:value-type="float" office:value="6000" calcext:value-type="float">
            <text:p>6000</text:p>
          </table:table-cell>
          <table:table-cell table:style-name="ce28" table:formula="of:=-[.F130]*[.$C$136]" office:value-type="float" office:value="6000" calcext:value-type="float">
            <text:p>6000</text:p>
          </table:table-cell>
          <table:table-cell table:style-name="ce28" table:formula="of:=-[.G130]*[.$C$136]" office:value-type="float" office:value="6000" calcext:value-type="float">
            <text:p>6000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depreciaciones</text:p>
          </table:table-cell>
          <table:table-cell table:style-name="ce28"/>
          <table:table-cell table:style-name="ce40" table:formula="of:=-[.D51]*[.$C$136]" office:value-type="float" office:value="4500" calcext:value-type="float">
            <text:p><text:s/>4,500 </text:p>
          </table:table-cell>
          <table:table-cell table:style-name="ce40" table:formula="of:=-[.E51]*[.$C$136]" office:value-type="float" office:value="4500" calcext:value-type="float">
            <text:p><text:s/>4,500 </text:p>
          </table:table-cell>
          <table:table-cell table:style-name="ce40" table:formula="of:=-[.F51]*[.$C$136]" office:value-type="float" office:value="4500" calcext:value-type="float">
            <text:p><text:s/>4,500 </text:p>
          </table:table-cell>
          <table:table-cell table:style-name="ce40" table:formula="of:=-[.G51]*[.$C$136]" office:value-type="float" office:value="4500" calcext:value-type="float">
            <text:p><text:s/>4,5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Ingreso por venta de Activo Fijo</text:p>
          </table:table-cell>
          <table:table-cell table:style-name="ce28" table:number-columns-repeated="4"/>
          <table:table-cell table:style-name="ce40" table:formula="of:=[.G73]" office:value-type="float" office:value="15000" calcext:value-type="float">
            <text:p><text:s/>15,0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Impuesto por ganancia de venta de AF</text:p>
          </table:table-cell>
          <table:table-cell table:style-name="ce28" table:number-columns-repeated="4"/>
          <table:table-cell table:style-name="ce40" table:formula="of:=-[.C58]*[.C136]" office:value-type="float" office:value="-1500" calcext:value-type="float">
            <text:p><text:s/>(1,500)</text:p>
          </table:table-cell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FLUJO NETO DE CAJA</text:p>
          </table:table-cell>
          <table:table-cell table:style-name="ce20"/>
          <table:table-cell table:style-name="ce51" table:formula="of:=SUM([.D126:.D134])" office:value-type="float" office:value="95500" calcext:value-type="float">
            <text:p><text:s/>95,500 </text:p>
          </table:table-cell>
          <table:table-cell table:style-name="ce51" table:formula="of:=SUM([.E126:.E134])" office:value-type="float" office:value="95500" calcext:value-type="float">
            <text:p><text:s/>95,500 </text:p>
          </table:table-cell>
          <table:table-cell table:style-name="ce51" table:formula="of:=SUM([.F126:.F134])" office:value-type="float" office:value="95500" calcext:value-type="float">
            <text:p><text:s/>95,500 </text:p>
          </table:table-cell>
          <table:table-cell table:style-name="ce51" table:formula="of:=SUM([.G126:.G134])" office:value-type="float" office:value="109000" calcext:value-type="float">
            <text:p><text:s/>109,0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mpuesto a la renta=</text:p>
          </table:table-cell>
          <table:table-cell table:style-name="ce48" office:value-type="percentage" office:value="0.3" calcext:value-type="percentage">
            <text:p>30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COK =</text:p>
          </table:table-cell>
          <table:table-cell table:style-name="ce48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VAN =</text:p>
          </table:table-cell>
          <table:table-cell table:style-name="ce49" table:formula="of:=NPV([.C137];[.D135:.G135])" office:value-type="float" office:value="253734.567901235" calcext:value-type="float">
            <text:p><text:s/>253,734.57 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OPCION B: </text:p>
          </table:table-cell>
          <table:table-cell table:number-columns-repeated="16382"/>
        </table:table-row>
        <table:table-row table:style-name="ro2">
          <table:table-cell/>
          <table:table-cell table:style-name="ce14" office:value-type="string" calcext:value-type="string" table:number-columns-spanned="6" table:number-rows-spanned="1">
            <text:p>flujo de caja de la Maquina Nueva</text:p>
          </table:table-cell>
          <table:covered-table-cell table:number-columns-repeated="5" table:style-name="ce39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" office:value-type="string" calcext:value-type="string">
            <text:p>RUBR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Ventas de maquina actual</text:p>
          </table:table-cell>
          <table:table-cell table:style-name="ce50" table:formula="of:=[.C106]" office:value-type="float" office:value="60000" calcext:value-type="float">
            <text:p><text:s/>60,000 </text:p>
          </table:table-cell>
          <table:table-cell table:style-name="ce65" table:number-columns-repeated="4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EF por perdidad de venta de AF</text:p>
          </table:table-cell>
          <table:table-cell table:style-name="ce50" table:formula="of:=[.C107]" office:value-type="float" office:value="3000" calcext:value-type="float">
            <text:p><text:s/>3,000 </text:p>
          </table:table-cell>
          <table:table-cell table:style-name="ce65" table:number-columns-repeated="4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Compra de maquina nueva</text:p>
          </table:table-cell>
          <table:table-cell table:style-name="ce50" table:formula="of:=[.C108]" office:value-type="float" office:value="-160000" calcext:value-type="float">
            <text:p><text:s/>(160,000)</text:p>
          </table:table-cell>
          <table:table-cell table:style-name="ce65" table:number-columns-repeated="4"/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Ventas</text:p>
          </table:table-cell>
          <table:table-cell table:style-name="ce28"/>
          <table:table-cell table:style-name="ce40" table:formula="of:=[.D126]" office:value-type="float" office:value="200000" calcext:value-type="float">
            <text:p><text:s/>200,000 </text:p>
          </table:table-cell>
          <table:table-cell table:style-name="ce40" table:formula="of:=[.E126]" office:value-type="float" office:value="200000" calcext:value-type="float">
            <text:p><text:s/>200,000 </text:p>
          </table:table-cell>
          <table:table-cell table:style-name="ce40" table:formula="of:=[.F126]" office:value-type="float" office:value="200000" calcext:value-type="float">
            <text:p><text:s/>200,000 </text:p>
          </table:table-cell>
          <table:table-cell table:style-name="ce40" table:formula="of:=[.G126]" office:value-type="float" office:value="200000" calcext:value-type="float">
            <text:p><text:s/>200,0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Impuesto por ventas</text:p>
          </table:table-cell>
          <table:table-cell table:style-name="ce28"/>
          <table:table-cell table:style-name="ce40" table:formula="of:=-[.D146]*[.$C$136]" office:value-type="float" office:value="-60000" calcext:value-type="float">
            <text:p><text:s/>(60,000)</text:p>
          </table:table-cell>
          <table:table-cell table:style-name="ce40" table:formula="of:=-[.E146]*[.$C$136]" office:value-type="float" office:value="-60000" calcext:value-type="float">
            <text:p><text:s/>(60,000)</text:p>
          </table:table-cell>
          <table:table-cell table:style-name="ce40" table:formula="of:=-[.F146]*[.$C$136]" office:value-type="float" office:value="-60000" calcext:value-type="float">
            <text:p><text:s/>(60,000)</text:p>
          </table:table-cell>
          <table:table-cell table:style-name="ce40" table:formula="of:=-[.G146]*[.$C$136]" office:value-type="float" office:value="-60000" calcext:value-type="float">
            <text:p><text:s/>(60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Costos Variables</text:p>
          </table:table-cell>
          <table:table-cell table:style-name="ce28"/>
          <table:table-cell table:style-name="ce40" table:formula="of:=[.D110]" office:value-type="float" office:value="-30000" calcext:value-type="float">
            <text:p><text:s/>(30,000)</text:p>
          </table:table-cell>
          <table:table-cell table:style-name="ce40" table:formula="of:=[.E110]" office:value-type="float" office:value="-30000" calcext:value-type="float">
            <text:p><text:s/>(30,000)</text:p>
          </table:table-cell>
          <table:table-cell table:style-name="ce40" table:formula="of:=[.F110]" office:value-type="float" office:value="-30000" calcext:value-type="float">
            <text:p><text:s/>(30,000)</text:p>
          </table:table-cell>
          <table:table-cell table:style-name="ce40" table:formula="of:=[.G110]" office:value-type="float" office:value="-30000" calcext:value-type="float">
            <text:p><text:s/>(30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costos variables</text:p>
          </table:table-cell>
          <table:table-cell table:style-name="ce28"/>
          <table:table-cell table:style-name="ce40" table:formula="of:=-[.D148]*[.$C$136]" office:value-type="float" office:value="9000" calcext:value-type="float">
            <text:p><text:s/>9,000 </text:p>
          </table:table-cell>
          <table:table-cell table:style-name="ce40" table:formula="of:=-[.E148]*[.$C$136]" office:value-type="float" office:value="9000" calcext:value-type="float">
            <text:p><text:s/>9,000 </text:p>
          </table:table-cell>
          <table:table-cell table:style-name="ce40" table:formula="of:=-[.F148]*[.$C$136]" office:value-type="float" office:value="9000" calcext:value-type="float">
            <text:p><text:s/>9,000 </text:p>
          </table:table-cell>
          <table:table-cell table:style-name="ce40" table:formula="of:=-[.G148]*[.$C$136]" office:value-type="float" office:value="9000" calcext:value-type="float">
            <text:p><text:s/>9,0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Costos Fijos</text:p>
          </table:table-cell>
          <table:table-cell table:style-name="ce28"/>
          <table:table-cell table:style-name="ce40" table:formula="of:=[.D111]" office:value-type="float" office:value="-15000" calcext:value-type="float">
            <text:p><text:s/>(15,000)</text:p>
          </table:table-cell>
          <table:table-cell table:style-name="ce40" table:formula="of:=[.E111]" office:value-type="float" office:value="-15000" calcext:value-type="float">
            <text:p><text:s/>(15,000)</text:p>
          </table:table-cell>
          <table:table-cell table:style-name="ce40" table:formula="of:=[.F111]" office:value-type="float" office:value="-15000" calcext:value-type="float">
            <text:p><text:s/>(15,000)</text:p>
          </table:table-cell>
          <table:table-cell table:style-name="ce40" table:formula="of:=[.G111]" office:value-type="float" office:value="-15000" calcext:value-type="float">
            <text:p><text:s/>(15,000)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costos fijos</text:p>
          </table:table-cell>
          <table:table-cell table:style-name="ce28"/>
          <table:table-cell table:style-name="ce28" table:formula="of:=-[.D150]*[.$C$136]" office:value-type="float" office:value="4500" calcext:value-type="float">
            <text:p>4500</text:p>
          </table:table-cell>
          <table:table-cell table:style-name="ce28" table:formula="of:=-[.E150]*[.$C$136]" office:value-type="float" office:value="4500" calcext:value-type="float">
            <text:p>4500</text:p>
          </table:table-cell>
          <table:table-cell table:style-name="ce28" table:formula="of:=-[.F150]*[.$C$136]" office:value-type="float" office:value="4500" calcext:value-type="float">
            <text:p>4500</text:p>
          </table:table-cell>
          <table:table-cell table:style-name="ce28" table:formula="of:=-[.G150]*[.$C$136]" office:value-type="float" office:value="4500" calcext:value-type="float">
            <text:p>4500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Escudo fiscal por depreciaciones</text:p>
          </table:table-cell>
          <table:table-cell table:style-name="ce28"/>
          <table:table-cell table:style-name="ce40" table:formula="of:=-[.D88]*[.$C$136]" office:value-type="float" office:value="10500" calcext:value-type="float">
            <text:p><text:s/>10,500 </text:p>
          </table:table-cell>
          <table:table-cell table:style-name="ce40" table:formula="of:=-[.E88]*[.$C$136]" office:value-type="float" office:value="10500" calcext:value-type="float">
            <text:p><text:s/>10,500 </text:p>
          </table:table-cell>
          <table:table-cell table:style-name="ce40" table:formula="of:=-[.F88]*[.$C$136]" office:value-type="float" office:value="10500" calcext:value-type="float">
            <text:p><text:s/>10,500 </text:p>
          </table:table-cell>
          <table:table-cell table:style-name="ce40" table:formula="of:=-[.G88]*[.$C$136]" office:value-type="float" office:value="10500" calcext:value-type="float">
            <text:p><text:s/>10,500 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Ingreso por venta de maquina nueva</text:p>
          </table:table-cell>
          <table:table-cell table:style-name="ce40"/>
          <table:table-cell table:style-name="ce28" table:number-columns-repeated="3"/>
          <table:table-cell table:style-name="ce40" table:formula="of:=[.G113]" office:value-type="float" office:value="20000" calcext:value-type="float">
            <text:p><text:s/>20,000 </text:p>
          </table:table-cell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FLUJO NETO DE CAJA</text:p>
          </table:table-cell>
          <table:table-cell table:style-name="ce51" table:formula="of:=SUM([.C143:.C153])" office:value-type="float" office:value="-97000" calcext:value-type="float">
            <text:p><text:s/>(97,000)</text:p>
          </table:table-cell>
          <table:table-cell table:style-name="ce51" table:formula="of:=SUM([.D143:.D153])" office:value-type="float" office:value="119000" calcext:value-type="float">
            <text:p><text:s/>119,000 </text:p>
          </table:table-cell>
          <table:table-cell table:style-name="ce51" table:formula="of:=SUM([.E143:.E153])" office:value-type="float" office:value="119000" calcext:value-type="float">
            <text:p><text:s/>119,000 </text:p>
          </table:table-cell>
          <table:table-cell table:style-name="ce51" table:formula="of:=SUM([.F143:.F153])" office:value-type="float" office:value="119000" calcext:value-type="float">
            <text:p><text:s/>119,000 </text:p>
          </table:table-cell>
          <table:table-cell table:style-name="ce51" table:formula="of:=SUM([.G143:.G153])" office:value-type="float" office:value="139000" calcext:value-type="float">
            <text:p><text:s/>139,000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mpuesto a la renta=</text:p>
          </table:table-cell>
          <table:table-cell table:style-name="ce48" office:value-type="percentage" office:value="0.3" calcext:value-type="percentage">
            <text:p>30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COK =</text:p>
          </table:table-cell>
          <table:table-cell table:style-name="ce48" table:formula="of:=[.C137]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VAN=</text:p>
          </table:table-cell>
          <table:table-cell table:style-name="ce49" table:formula="of:=NPV([.C156];[.D154:.G154])+[.C154]" office:value-type="float" office:value="220704.475308642" calcext:value-type="float">
            <text:p><text:s/>220,704.48 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METODO III: FLUJO DE CAJA INCREMENTAL O DIFERENCIAL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lujo de Caja Incremental ( B-A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163]+1" office:value-type="float" office:value="1" calcext:value-type="float">
            <text:p>1</text:p>
          </table:table-cell>
          <table:table-cell table:style-name="ce31" table:formula="of:=[.D163]+1" office:value-type="float" office:value="2" calcext:value-type="float">
            <text:p>2</text:p>
          </table:table-cell>
          <table:table-cell table:style-name="ce31" table:formula="of:=[.E163]+1" office:value-type="float" office:value="3" calcext:value-type="float">
            <text:p>3</text:p>
          </table:table-cell>
          <table:table-cell table:style-name="ce66" table:formula="of:=[.F163]+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C con proyecto (B)</text:p>
          </table:table-cell>
          <table:table-cell table:style-name="ce52" table:formula="of:=[.C114]" office:value-type="float" office:value="-97000" calcext:value-type="float">
            <text:p><text:s/>(97,000)</text:p>
          </table:table-cell>
          <table:table-cell table:style-name="ce52" table:formula="of:=[.D114]" office:value-type="float" office:value="119000" calcext:value-type="float">
            <text:p><text:s/>119,000 </text:p>
          </table:table-cell>
          <table:table-cell table:style-name="ce52" table:formula="of:=[.E114]" office:value-type="float" office:value="119000" calcext:value-type="float">
            <text:p><text:s/>119,000 </text:p>
          </table:table-cell>
          <table:table-cell table:style-name="ce52" table:formula="of:=[.F114]" office:value-type="float" office:value="119000" calcext:value-type="float">
            <text:p><text:s/>119,000 </text:p>
          </table:table-cell>
          <table:table-cell table:style-name="ce74" table:formula="of:=[.G114]" office:value-type="float" office:value="139000" calcext:value-type="float">
            <text:p><text:s/>139,000 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>
            <text:p>FC sin Proyecto (A)</text:p>
          </table:table-cell>
          <table:table-cell table:style-name="ce33" table:formula="of:=[.C74]" office:value-type="float" office:value="0" calcext:value-type="float">
            <text:p>0</text:p>
          </table:table-cell>
          <table:table-cell table:style-name="ce33" table:formula="of:=[.D74]" office:value-type="float" office:value="95500" calcext:value-type="float">
            <text:p>95500</text:p>
          </table:table-cell>
          <table:table-cell table:style-name="ce33" table:formula="of:=[.E74]" office:value-type="float" office:value="95500" calcext:value-type="float">
            <text:p>95500</text:p>
          </table:table-cell>
          <table:table-cell table:style-name="ce33" table:formula="of:=[.F74]" office:value-type="float" office:value="95500" calcext:value-type="float">
            <text:p>95500</text:p>
          </table:table-cell>
          <table:table-cell table:style-name="ce69" table:formula="of:=[.G74]" office:value-type="float" office:value="109000" calcext:value-type="float">
            <text:p>10900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Flujo de Caja Incremental</text:p>
          </table:table-cell>
          <table:table-cell table:style-name="ce45" table:formula="of:=[.C164]-[.C165]" office:value-type="float" office:value="-97000" calcext:value-type="float">
            <text:p><text:s/>(97,000)</text:p>
          </table:table-cell>
          <table:table-cell table:style-name="ce45" table:formula="of:=[.D164]-[.D165]" office:value-type="float" office:value="23500" calcext:value-type="float">
            <text:p><text:s/>23,500 </text:p>
          </table:table-cell>
          <table:table-cell table:style-name="ce45" table:formula="of:=[.E164]-[.E165]" office:value-type="float" office:value="23500" calcext:value-type="float">
            <text:p><text:s/>23,500 </text:p>
          </table:table-cell>
          <table:table-cell table:style-name="ce45" table:formula="of:=[.F164]-[.F165]" office:value-type="float" office:value="23500" calcext:value-type="float">
            <text:p><text:s/>23,500 </text:p>
          </table:table-cell>
          <table:table-cell table:style-name="ce75" table:formula="of:=[.G164]-[.G165]" office:value-type="float" office:value="30000" calcext:value-type="float">
            <text:p><text:s/>30,000 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K =</text:p>
          </table:table-cell>
          <table:table-cell table:style-name="ce48" table:formula="of:=[.C156]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VAN Incremental =</text:p>
          </table:table-cell>
          <table:table-cell table:style-name="ce53" table:formula="of:=NPV([.C168];[.D166:.G166])+[.C166]" office:value-type="float" office:value="-33030.0925925926" calcext:value-type="float">
            <office:annotation draw:style-name="gr2" draw:text-style-name="P1" svg:width="3.932cm" svg:height="10.866cm" svg:x="11.129cm" svg:y="75.619cm" draw:caption-point-x="-0.407cm" draw:caption-point-y="0.274cm">
              <dc:creator>Edison Achalma Mendoza</dc:creator>
              <dc:date>2024-07-31T03:25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*si es positivo la alternativa con proyecto</text:p>
              <text:p>incrementa valor a la empresa. </text:p>
              <text:p/>
              <text:p>En este caso la alternativa sin proyecto conviene.</text:p>
            </office:annotation>
            <text:p>$ -33,030.09</text:p>
          </table:table-cell>
          <table:table-cell table:number-columns-repeated="16381"/>
        </table:table-row>
      </table:table>
      <table:table table:name="Hoja3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$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steles" style:display-name="PageStyle_Paste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dc:creator>EDISON ACHALMA</dc:creator>
    <meta:print-date>2004-10-17T17:01:32</meta:print-date>
    <meta:creation-date>2003-08-13T21:47:24</meta:creation-date>
    <dc:date>2021-08-11T19:45:39</dc:date>
    <meta:generator>LibreOffice/24.2.4.2$Linux_X86_64 LibreOffice_project/420$Build-2</meta:generator>
    <meta:document-statistic meta:table-count="2" meta:cell-count="417" meta:object-count="0"/>
    <meta:user-defined meta:name="AppVersion">16.0300</meta:user-defined>
    <meta:user-defined meta:name="Company">Universidad del Pacífico</meta:user-defined>
  </office:meta>
</office:document-meta>
</file>