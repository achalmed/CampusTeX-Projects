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6.74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965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fluj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cc9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cc9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34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34">
      <style:table-cell-properties style:diagonal-bl-tr="none" style:diagonal-tl-br="none" fo:border="0.74pt solid #000000" style:rotation-align="none"/>
    </style:style>
    <style:style style:name="ce4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36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33">
      <style:table-cell-properties fo:background-color="#ffcc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33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style:rotation-align="none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Excel_20_Built-in_20_Comma" style:data-style-name="N134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Comma" style:data-style-name="N134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34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3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35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3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3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3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78" style:family="table-cell" style:parent-style-name="Default" style:data-style-name="N138">
      <style:table-cell-properties style:diagonal-bl-tr="none" style:diagonal-tl-br="none" fo:border="0.74pt solid #000000" style:rotation-align="none"/>
    </style:style>
    <style:style style:name="ce79" style:family="table-cell" style:parent-style-name="Default" style:data-style-name="N140">
      <style:table-cell-properties style:diagonal-bl-tr="none" style:diagonal-tl-br="none" fo:border="0.74pt solid #000000" style:rotation-align="none"/>
    </style:style>
    <style:style style:name="ce80" style:family="table-cell" style:parent-style-name="Default" style:data-style-name="N135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39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5" style:family="table-cell" style:parent-style-name="Default">
      <style:table-cell-properties fo:background-color="#d9d9d9" style:diagonal-bl-tr="none" style:diagonal-tl-br="none" fo:border="none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8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9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91" style:family="table-cell" style:parent-style-name="Excel_20_Built-in_20_Comma" style:data-style-name="N134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Comma" style:data-style-name="N134">
      <style:table-cell-properties fo:border-bottom="1.76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96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97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03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135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37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35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38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36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38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11" style:family="table-cell" style:parent-style-name="Default" style:data-style-name="N13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14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13" style:family="table-cell" style:parent-style-name="Default" style:data-style-name="N135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none" fo:background-color="#c0c0c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33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33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134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j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/>
          <table:table-cell table:style-name="ce1" office:value-type="string" calcext:value-type="string">
            <text:p>TALLER DE FLUJO DE CAJA ECONOMICO Y FINANCIERO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/>
          <table:table-cell table:style-name="ce61" office:value-type="string" calcext:value-type="string">
            <text:p>TRANSPORTES GIRON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1.- MODULO DE INGRESOS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3">
          <table:table-cell/>
          <table:table-cell table:style-name="ce2" office:value-type="string" calcext:value-type="string">
            <text:p>RUBRO</text:p>
          </table:table-cell>
          <table:table-cell table:style-name="ce29" office:value-type="string" calcext:value-type="string">
            <text:p>A. Cajas</text:p>
          </table:table-cell>
          <table:table-cell table:style-name="ce29" office:value-type="string" calcext:value-type="string">
            <text:p>B. Precio</text:p>
          </table:table-cell>
          <table:table-cell table:style-name="ce83" office:value-type="string" calcext:value-type="string">
            <text:p>C. Ingresos <text:s text:c="4"/>x viaje (1)</text:p>
          </table:table-cell>
          <table:table-cell table:style-name="ce86" office:value-type="string" calcext:value-type="string">
            <text:p>D. Nº viajes anuales</text:p>
          </table:table-cell>
          <table:table-cell table:style-name="ce88" office:value-type="string" calcext:value-type="string">
            <text:p>E. Ingreso Anual(2)</text:p>
          </table:table-cell>
          <table:table-cell table:style-name="ce121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amiòn A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table:formula="of:=[.C8]*[.D8]" office:value-type="float" office:value="20" calcext:value-type="float">
            <text:p>20</text:p>
          </table:table-cell>
          <table:table-cell table:style-name="ce87" office:value-type="float" office:value="1200" calcext:value-type="float">
            <text:p>1,200</text:p>
          </table:table-cell>
          <table:table-cell table:style-name="ce89" table:formula="of:=[.E8]*[.F8]" office:value-type="float" office:value="24000" calcext:value-type="float">
            <text:p>24000</text:p>
          </table:table-cell>
          <table:table-cell table:style-name="ce60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miòn B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0.15" calcext:value-type="float">
            <text:p>0.15</text:p>
          </table:table-cell>
          <table:table-cell table:style-name="ce31" table:formula="of:=[.C9]*[.D9]" office:value-type="float" office:value="16.95" calcext:value-type="float">
            <text:p>16.95</text:p>
          </table:table-cell>
          <table:table-cell table:style-name="ce77" office:value-type="float" office:value="1200" calcext:value-type="float">
            <text:p>1,200</text:p>
          </table:table-cell>
          <table:table-cell table:style-name="ce90" table:formula="of:=[.E9]*[.F9]" office:value-type="float" office:value="20340" calcext:value-type="float">
            <text:p>20340</text:p>
          </table:table-cell>
          <table:table-cell table:style-name="ce60"/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F. Total de ingresos anuales (3)</text:p>
          </table:table-cell>
          <table:table-cell table:style-name="ce32"/>
          <table:table-cell table:style-name="ce62" table:formula="of:=[.D8]*[.D9]" office:value-type="float" office:value="0.015" calcext:value-type="float">
            <text:p><text:s/>0 </text:p>
          </table:table-cell>
          <table:table-cell table:style-name="ce62" table:formula="of:=[.E8]*[.E9]" office:value-type="float" office:value="339" calcext:value-type="float">
            <text:p><text:s/>339 </text:p>
          </table:table-cell>
          <table:table-cell table:style-name="ce62"/>
          <table:table-cell table:style-name="ce91" table:formula="of:=[.G8]+[.G9]" office:value-type="float" office:value="44340" calcext:value-type="float">
            <text:p><text:s/>44,340 </text:p>
          </table:table-cell>
          <table:table-cell table:style-name="ce60"/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G. Total ingresos anuales con IGV (4)</text:p>
          </table:table-cell>
          <table:table-cell table:style-name="ce33"/>
          <table:table-cell table:style-name="ce63" table:number-columns-repeated="3"/>
          <table:table-cell table:style-name="ce92" table:formula="of:=1.18*[.G10]" office:value-type="float" office:value="52321.2" calcext:value-type="float">
            <text:p><text:s/>52,321 </text:p>
          </table:table-cell>
          <table:table-cell table:style-name="ce60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(1) = A*B</text:p>
          </table:table-cell>
          <table:table-cell table:style-name="ce7"/>
          <table:table-cell table:style-name="ce64" table:number-columns-repeated="4"/>
          <table:table-cell table:style-name="ce60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(2) = C*D</text:p>
          </table:table-cell>
          <table:table-cell table:style-name="ce7"/>
          <table:table-cell table:style-name="ce64" table:number-columns-repeated="4"/>
          <table:table-cell table:style-name="ce60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(3) = E( camion A)+E(Camion B)</text:p>
          </table:table-cell>
          <table:table-cell table:style-name="ce7"/>
          <table:table-cell table:style-name="ce64" table:number-columns-repeated="4"/>
          <table:table-cell table:style-name="ce60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(4) = 1.18* F</text:p>
          </table:table-cell>
          <table:table-cell table:style-name="ce7"/>
          <table:table-cell table:style-name="ce64" table:number-columns-repeated="4"/>
          <table:table-cell table:style-name="ce60"/>
          <table:table-cell table:number-columns-repeated="16376"/>
        </table:table-row>
        <table:table-row table:style-name="ro1">
          <table:table-cell table:number-columns-repeated="2"/>
          <table:table-cell table:style-name="ce7"/>
          <table:table-cell table:style-name="ce64" table:number-columns-repeated="4"/>
          <table:table-cell table:style-name="ce60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2.- MODULO DE COSTOS Y DE INVERSIÒN Y LIQUIDACIÒN</text:p>
          </table:table-cell>
          <table:table-cell table:style-name="ce7"/>
          <table:table-cell table:style-name="ce64" table:number-columns-repeated="4"/>
          <table:table-cell table:style-name="ce60"/>
          <table:table-cell table:number-columns-repeated="16376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RUBRO</text:p>
          </table:table-cell>
          <table:table-cell table:style-name="ce34" office:value-type="string" calcext:value-type="string">
            <text:p>Año 0 </text:p>
          </table:table-cell>
          <table:table-cell table:style-name="ce34" office:value-type="string" calcext:value-type="string">
            <text:p>Año 1</text:p>
          </table:table-cell>
          <table:table-cell table:style-name="ce34" office:value-type="string" calcext:value-type="string">
            <text:p>Año 2</text:p>
          </table:table-cell>
          <table:table-cell table:style-name="ce34" office:value-type="string" calcext:value-type="string">
            <text:p>Año 3</text:p>
          </table:table-cell>
          <table:table-cell table:style-name="ce93" office:value-type="string" calcext:value-type="string">
            <text:p>Año 4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Costos sin IGV</text:p>
          </table:table-cell>
          <table:table-cell table:style-name="ce35"/>
          <table:table-cell table:style-name="ce30" table:number-columns-repeated="3"/>
          <table:table-cell table:style-name="ce89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H. Inversiòn y Liquidaciòn</text:p>
          </table:table-cell>
          <table:table-cell table:style-name="ce36" table:formula="of:=[.C23]+[.C24]" office:value-type="float" office:value="-32434" calcext:value-type="float">
            <text:p><text:s/>(32,434)</text:p>
          </table:table-cell>
          <table:table-cell table:style-name="ce37" table:formula="of:=[.D23]+[.D24]" office:value-type="float" office:value="0" calcext:value-type="float">
            <text:p><text:s/>- <text:s text:c="2"/></text:p>
          </table:table-cell>
          <table:table-cell table:style-name="ce37" table:formula="of:=[.E23]+[.E24]" office:value-type="float" office:value="0" calcext:value-type="float">
            <text:p><text:s/>- <text:s text:c="2"/></text:p>
          </table:table-cell>
          <table:table-cell table:style-name="ce37" table:formula="of:=[.F23]+[.F24]" office:value-type="float" office:value="0" calcext:value-type="float">
            <text:p><text:s/>- <text:s text:c="2"/></text:p>
          </table:table-cell>
          <table:table-cell table:style-name="ce94" table:formula="of:=[.G23]+[.G24]" office:value-type="float" office:value="20434" calcext:value-type="float">
            <text:p><text:s/>20,434 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Camiòn B</text:p>
          </table:table-cell>
          <table:table-cell table:style-name="ce37" office:value-type="float" office:value="-28000" calcext:value-type="float">
            <text:p><text:s/>(28,000)</text:p>
          </table:table-cell>
          <table:table-cell table:style-name="ce65"/>
          <table:table-cell table:style-name="ce31" table:number-columns-repeated="2"/>
          <table:table-cell table:style-name="ce95" office:value-type="float" office:value="16000" calcext:value-type="float">
            <text:p>16,00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Incremento KW (5)</text:p>
          </table:table-cell>
          <table:table-cell table:style-name="ce37" table:formula="of:=-0.1*[.G10]" office:value-type="float" office:value="-4434" calcext:value-type="float">
            <text:p><text:s/>(4,434)</text:p>
          </table:table-cell>
          <table:table-cell table:style-name="ce65"/>
          <table:table-cell table:style-name="ce31" table:number-columns-repeated="2"/>
          <table:table-cell table:style-name="ce96" table:formula="of:=-[.C24]" office:value-type="float" office:value="4434" calcext:value-type="float">
            <text:p><text:s/>4,434 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I. Costos</text:p>
          </table:table-cell>
          <table:table-cell table:style-name="ce38"/>
          <table:table-cell table:style-name="ce66" table:formula="of:=[.D26]+[.D27]+[.D28]+[.D29]" office:value-type="float" office:value="-13280" calcext:value-type="float">
            <text:p>-13,280</text:p>
          </table:table-cell>
          <table:table-cell table:style-name="ce66" table:formula="of:=[.E26]+[.E27]+[.E28]+[.E29]" office:value-type="float" office:value="-13280" calcext:value-type="float">
            <text:p>-13,280</text:p>
          </table:table-cell>
          <table:table-cell table:style-name="ce66" table:formula="of:=[.F26]+[.F27]+[.F28]+[.F29]" office:value-type="float" office:value="-13280" calcext:value-type="float">
            <text:p>-13,280</text:p>
          </table:table-cell>
          <table:table-cell table:style-name="ce97" table:formula="of:=[.G26]+[.G27]+[.G28]+[.G29]" office:value-type="float" office:value="-13280" calcext:value-type="float">
            <text:p>-13,28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J. Combustibles</text:p>
          </table:table-cell>
          <table:table-cell table:style-name="ce37"/>
          <table:table-cell table:number-columns-repeated="3" table:style-name="ce67" office:value-type="float" office:value="-1600" calcext:value-type="float">
            <text:p>-1,600</text:p>
          </table:table-cell>
          <table:table-cell table:style-name="ce98" office:value-type="float" office:value="-1600" calcext:value-type="float">
            <text:p>-1,60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K. Repuestos y Servicios</text:p>
          </table:table-cell>
          <table:table-cell table:style-name="ce37"/>
          <table:table-cell table:number-columns-repeated="3" table:style-name="ce67" office:value-type="float" office:value="-1600" calcext:value-type="float">
            <text:p>-1,600</text:p>
          </table:table-cell>
          <table:table-cell table:style-name="ce98" office:value-type="float" office:value="-1600" calcext:value-type="float">
            <text:p>-1,60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L. Sueldo de choferes (6)</text:p>
          </table:table-cell>
          <table:table-cell table:style-name="ce37"/>
          <table:table-cell table:style-name="ce68" table:formula="of:=-3840*2" office:value-type="float" office:value="-7680" calcext:value-type="float">
            <text:p>-7680</text:p>
          </table:table-cell>
          <table:table-cell table:style-name="ce68" table:formula="of:=-3840*2" office:value-type="float" office:value="-7680" calcext:value-type="float">
            <text:p>-7680</text:p>
          </table:table-cell>
          <table:table-cell table:style-name="ce68" table:formula="of:=-3840*2" office:value-type="float" office:value="-7680" calcext:value-type="float">
            <text:p>-7680</text:p>
          </table:table-cell>
          <table:table-cell table:style-name="ce99" table:formula="of:=-3840*2" office:value-type="float" office:value="-7680" calcext:value-type="float">
            <text:p>-768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>
            <text:p>M. Sueldo de ayudantes (7)</text:p>
          </table:table-cell>
          <table:table-cell table:style-name="ce39"/>
          <table:table-cell table:style-name="ce69" table:formula="of:=-1200*2" office:value-type="float" office:value="-2400" calcext:value-type="float">
            <text:p>-2400</text:p>
          </table:table-cell>
          <table:table-cell table:style-name="ce69" table:formula="of:=-1200*2" office:value-type="float" office:value="-2400" calcext:value-type="float">
            <text:p>-2400</text:p>
          </table:table-cell>
          <table:table-cell table:style-name="ce69" table:formula="of:=-1200*2" office:value-type="float" office:value="-2400" calcext:value-type="float">
            <text:p>-2400</text:p>
          </table:table-cell>
          <table:table-cell table:style-name="ce100" table:formula="of:=-1200*2" office:value-type="float" office:value="-2400" calcext:value-type="float">
            <text:p>-240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. TOTAL SIN IGV (8)</text:p>
          </table:table-cell>
          <table:table-cell table:style-name="ce40" table:formula="of:=[.C22]+[.C25]" office:value-type="float" office:value="-32434" calcext:value-type="float">
            <text:p><text:s/>(32,434)</text:p>
          </table:table-cell>
          <table:table-cell table:style-name="ce40" table:formula="of:=[.D22]+[.D25]" office:value-type="float" office:value="-13280" calcext:value-type="float">
            <text:p><text:s/>(13,280)</text:p>
          </table:table-cell>
          <table:table-cell table:style-name="ce40" table:formula="of:=[.E22]+[.E25]" office:value-type="float" office:value="-13280" calcext:value-type="float">
            <text:p><text:s/>(13,280)</text:p>
          </table:table-cell>
          <table:table-cell table:style-name="ce40" table:formula="of:=[.F22]+[.F25]" office:value-type="float" office:value="-13280" calcext:value-type="float">
            <text:p><text:s/>(13,280)</text:p>
          </table:table-cell>
          <table:table-cell table:style-name="ce101" table:formula="of:=[.G22]+[.G25]" office:value-type="float" office:value="7154" calcext:value-type="float">
            <text:p><text:s/>7,154 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>
            <text:p>Costos con IGV</text:p>
          </table:table-cell>
          <table:table-cell table:style-name="ce41"/>
          <table:table-cell table:style-name="ce70"/>
          <table:table-cell table:style-name="ce84" table:number-columns-repeated="2"/>
          <table:table-cell table:style-name="ce102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O. Inversiòn y Liquidaciòn </text:p>
          </table:table-cell>
          <table:table-cell table:style-name="ce36" table:formula="of:=[.C33]+[.C34]" office:value-type="float" office:value="-37474" calcext:value-type="float">
            <text:p><text:s/>(37,474)</text:p>
          </table:table-cell>
          <table:table-cell table:style-name="ce36" table:formula="of:=[.D33]+[.D34]" office:value-type="float" office:value="0" calcext:value-type="float">
            <text:p><text:s/>- <text:s text:c="2"/></text:p>
          </table:table-cell>
          <table:table-cell table:style-name="ce36" table:formula="of:=[.E33]+[.E34]" office:value-type="float" office:value="0" calcext:value-type="float">
            <text:p><text:s/>- <text:s text:c="2"/></text:p>
          </table:table-cell>
          <table:table-cell table:style-name="ce36" table:formula="of:=[.F33]+[.F34]" office:value-type="float" office:value="0" calcext:value-type="float">
            <text:p><text:s/>- <text:s text:c="2"/></text:p>
          </table:table-cell>
          <table:table-cell table:style-name="ce36" table:formula="of:=[.G33]+[.G34]" office:value-type="float" office:value="23314" calcext:value-type="float">
            <text:p><text:s/>23,314 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Camiòn B (9)</text:p>
          </table:table-cell>
          <table:table-cell table:style-name="ce37" table:formula="of:=[.C23]*1.18" office:value-type="float" office:value="-33040" calcext:value-type="float">
            <text:p><text:s/>(33,040)</text:p>
          </table:table-cell>
          <table:table-cell table:style-name="ce68"/>
          <table:table-cell table:style-name="ce31" table:number-columns-repeated="2"/>
          <table:table-cell table:style-name="ce90" table:formula="of:=[.G23]*1.18" office:value-type="float" office:value="18880" calcext:value-type="float">
            <text:p>1888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Incremento KW </text:p>
          </table:table-cell>
          <table:table-cell table:style-name="ce37" table:formula="of:=[.C24]" office:value-type="float" office:value="-4434" calcext:value-type="float">
            <text:p><text:s/>(4,434)</text:p>
          </table:table-cell>
          <table:table-cell table:style-name="ce68"/>
          <table:table-cell table:style-name="ce31" table:number-columns-repeated="2"/>
          <table:table-cell table:style-name="ce96" table:formula="of:=-[.C34]" office:value-type="float" office:value="4434" calcext:value-type="float">
            <text:p><text:s/>4,434 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P. Costos (10)</text:p>
          </table:table-cell>
          <table:table-cell table:style-name="ce37"/>
          <table:table-cell table:style-name="ce52" table:formula="of:=[.D36]+[.D37]+[.D38]+[.D39]" office:value-type="float" office:value="-13856" calcext:value-type="float">
            <text:p>-13856</text:p>
          </table:table-cell>
          <table:table-cell table:style-name="ce52" table:formula="of:=[.E36]+[.E37]+[.E38]+[.E39]" office:value-type="float" office:value="-13856" calcext:value-type="float">
            <text:p>-13856</text:p>
          </table:table-cell>
          <table:table-cell table:style-name="ce52" table:formula="of:=[.F36]+[.F37]+[.F38]+[.F39]" office:value-type="float" office:value="-13856" calcext:value-type="float">
            <text:p>-13856</text:p>
          </table:table-cell>
          <table:table-cell table:style-name="ce52" table:formula="of:=[.G36]+[.G37]+[.G38]+[.G39]" office:value-type="float" office:value="-13856" calcext:value-type="float">
            <text:p>-13856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Q. Combustibles (11)</text:p>
          </table:table-cell>
          <table:table-cell table:style-name="ce37"/>
          <table:table-cell table:style-name="ce68" table:formula="of:=[.D26]*1.18" office:value-type="float" office:value="-1888" calcext:value-type="float">
            <text:p>-1888</text:p>
          </table:table-cell>
          <table:table-cell table:style-name="ce68" table:formula="of:=[.E26]*1.18" office:value-type="float" office:value="-1888" calcext:value-type="float">
            <text:p>-1888</text:p>
          </table:table-cell>
          <table:table-cell table:style-name="ce68" table:formula="of:=[.F26]*1.18" office:value-type="float" office:value="-1888" calcext:value-type="float">
            <text:p>-1888</text:p>
          </table:table-cell>
          <table:table-cell table:style-name="ce68" table:formula="of:=[.G26]*1.18" office:value-type="float" office:value="-1888" calcext:value-type="float">
            <text:p>-1888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R. Repuestos y Servicios (12)</text:p>
          </table:table-cell>
          <table:table-cell table:style-name="ce37"/>
          <table:table-cell table:style-name="ce68" table:formula="of:=[.D27]*1.18" office:value-type="float" office:value="-1888" calcext:value-type="float">
            <text:p>-1888</text:p>
          </table:table-cell>
          <table:table-cell table:style-name="ce68" table:formula="of:=[.E27]*1.18" office:value-type="float" office:value="-1888" calcext:value-type="float">
            <text:p>-1888</text:p>
          </table:table-cell>
          <table:table-cell table:style-name="ce68" table:formula="of:=[.F27]*1.18" office:value-type="float" office:value="-1888" calcext:value-type="float">
            <text:p>-1888</text:p>
          </table:table-cell>
          <table:table-cell table:style-name="ce68" table:formula="of:=[.G27]*1.18" office:value-type="float" office:value="-1888" calcext:value-type="float">
            <text:p>-1888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S.. Sueldo de choferes (13)</text:p>
          </table:table-cell>
          <table:table-cell table:style-name="ce37"/>
          <table:table-cell table:style-name="ce68" table:formula="of:=[.D28]" office:value-type="float" office:value="-7680" calcext:value-type="float">
            <text:p>-7680</text:p>
          </table:table-cell>
          <table:table-cell table:style-name="ce68" table:formula="of:=[.E28]" office:value-type="float" office:value="-7680" calcext:value-type="float">
            <text:p>-7680</text:p>
          </table:table-cell>
          <table:table-cell table:style-name="ce68" table:formula="of:=[.F28]" office:value-type="float" office:value="-7680" calcext:value-type="float">
            <text:p>-7680</text:p>
          </table:table-cell>
          <table:table-cell table:style-name="ce68" table:formula="of:=[.G28]" office:value-type="float" office:value="-7680" calcext:value-type="float">
            <text:p>-768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>
            <text:p>T. Sueldo de ayudantes (13)</text:p>
          </table:table-cell>
          <table:table-cell table:style-name="ce39"/>
          <table:table-cell table:style-name="ce69" table:formula="of:=[.D29]" office:value-type="float" office:value="-2400" calcext:value-type="float">
            <text:p>-2400</text:p>
          </table:table-cell>
          <table:table-cell table:style-name="ce69" table:formula="of:=[.E29]" office:value-type="float" office:value="-2400" calcext:value-type="float">
            <text:p>-2400</text:p>
          </table:table-cell>
          <table:table-cell table:style-name="ce69" table:formula="of:=[.F29]" office:value-type="float" office:value="-2400" calcext:value-type="float">
            <text:p>-2400</text:p>
          </table:table-cell>
          <table:table-cell table:style-name="ce69" table:formula="of:=[.G29]" office:value-type="float" office:value="-2400" calcext:value-type="float">
            <text:p>-2400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U. TOTAL CON IGV (14)</text:p>
          </table:table-cell>
          <table:table-cell table:style-name="ce42" table:formula="of:=[.C32]+[.C35]" office:value-type="float" office:value="-37474" calcext:value-type="float">
            <text:p><text:s/>(37,474)</text:p>
          </table:table-cell>
          <table:table-cell table:style-name="ce42" table:formula="of:=[.D32]+[.D35]" office:value-type="float" office:value="-13856" calcext:value-type="float">
            <text:p><text:s/>(13,856)</text:p>
          </table:table-cell>
          <table:table-cell table:style-name="ce42" table:formula="of:=[.E32]+[.E35]" office:value-type="float" office:value="-13856" calcext:value-type="float">
            <text:p><text:s/>(13,856)</text:p>
          </table:table-cell>
          <table:table-cell table:style-name="ce42" table:formula="of:=[.F32]+[.F35]" office:value-type="float" office:value="-13856" calcext:value-type="float">
            <text:p><text:s/>(13,856)</text:p>
          </table:table-cell>
          <table:table-cell table:style-name="ce42" table:formula="of:=[.G32]+[.G35]" office:value-type="float" office:value="9458" calcext:value-type="float">
            <text:p><text:s/>9,458 </text:p>
          </table:table-cell>
          <table:table-cell table:number-columns-repeated="16377"/>
        </table:table-row>
        <table:table-row table:style-name="ro1">
          <table:table-cell/>
          <table:table-cell table:style-name="ce16"/>
          <table:table-cell table:style-name="ce43" table:number-columns-repeated="2"/>
          <table:table-cell table:style-name="ce60" table:number-columns-repeated="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5) Cambio en KW = 0.1*Variacion de ventas sin IGV</text:p>
          </table:table-cell>
          <table:table-cell table:style-name="ce43" table:number-columns-repeated="2"/>
          <table:table-cell table:style-name="ce60" table:number-columns-repeated="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6) L = 3,840*2</text:p>
          </table:table-cell>
          <table:table-cell table:style-name="ce43" table:number-columns-repeated="2"/>
          <table:table-cell table:style-name="ce60" table:number-columns-repeated="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7) M= 1,200*2. No contempla al vendedor de la cervecerìa, por no corresponderle</text:p>
          </table:table-cell>
          <table:table-cell table:style-name="ce43" table:number-columns-repeated="2"/>
          <table:table-cell table:style-name="ce60" table:number-columns-repeated="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8) N = H+I</text:p>
          </table:table-cell>
          <table:table-cell table:style-name="ce43" table:number-columns-repeated="2"/>
          <table:table-cell table:style-name="ce60" table:number-columns-repeated="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9) Camiòn = 1.18*28,000</text:p>
          </table:table-cell>
          <table:table-cell table:style-name="ce43" table:number-columns-repeated="2"/>
          <table:table-cell table:style-name="ce85"/>
          <table:table-cell table:style-name="ce60" table:number-columns-repeated="2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10) P= Q+R+S+T</text:p>
          </table:table-cell>
          <table:table-cell table:style-name="ce43" table:number-columns-repeated="2"/>
          <table:table-cell table:style-name="ce60" table:number-columns-repeated="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11) Q= 1.18*J</text:p>
          </table:table-cell>
          <table:table-cell table:style-name="ce43" table:number-columns-repeated="2"/>
          <table:table-cell table:style-name="ce60" table:number-columns-repeated="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12) R= 1.18*K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13) Son sueldos, no se paga IGV <text:s/>por ello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14) U = 0+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3.- MODULO DE IGV</text:p>
          </table:table-cell>
          <table:table-cell table:number-columns-repeated="16382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style-name="ce17" office:value-type="string" calcext:value-type="string">
            <text:p>RUBRO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V. IGV Ingresos (15)</text:p>
          </table:table-cell>
          <table:table-cell table:style-name="ce45"/>
          <table:table-cell table:style-name="ce45" table:formula="of:=-([.$G$11]-[.$G$10])" office:value-type="float" office:value="-7981.2" calcext:value-type="float">
            <text:p><text:s/>(7,981)</text:p>
          </table:table-cell>
          <table:table-cell table:style-name="ce45" table:formula="of:=-([.$G$11]-[.$G$10])" office:value-type="float" office:value="-7981.2" calcext:value-type="float">
            <text:p><text:s/>(7,981)</text:p>
          </table:table-cell>
          <table:table-cell table:style-name="ce45" table:formula="of:=-([.$G$11]-[.$G$10])" office:value-type="float" office:value="-7981.2" calcext:value-type="float">
            <text:p><text:s/>(7,981)</text:p>
          </table:table-cell>
          <table:table-cell table:style-name="ce45" table:formula="of:=-([.$G$11]-[.$G$10])" office:value-type="float" office:value="-7981.2" calcext:value-type="float">
            <text:p><text:s/>(7,981)</text:p>
          </table:table-cell>
          <table:table-cell table:style-name="ce122"/>
          <table:table-cell table:style-name="ce124"/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W. IGV Egresos (16)</text:p>
          </table:table-cell>
          <table:table-cell table:style-name="ce45" table:formula="of:=-([.C40]-[.C30])" office:value-type="float" office:value="5040" calcext:value-type="float">
            <text:p><text:s/>5,040 </text:p>
          </table:table-cell>
          <table:table-cell table:style-name="ce45" table:formula="of:=-([.D40]-[.D30])" office:value-type="float" office:value="576" calcext:value-type="float">
            <text:p><text:s/>576 </text:p>
          </table:table-cell>
          <table:table-cell table:style-name="ce45" table:formula="of:=-([.E40]-[.E30])" office:value-type="float" office:value="576" calcext:value-type="float">
            <text:p><text:s/>576 </text:p>
          </table:table-cell>
          <table:table-cell table:style-name="ce45" table:formula="of:=-([.F40]-[.F30])" office:value-type="float" office:value="576" calcext:value-type="float">
            <text:p><text:s/>576 </text:p>
          </table:table-cell>
          <table:table-cell table:style-name="ce45" table:formula="of:=-([.G40]-[.G30])" office:value-type="float" office:value="-2304" calcext:value-type="float">
            <text:p><text:s/>(2,304)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X. Diferencia (17)</text:p>
          </table:table-cell>
          <table:table-cell table:style-name="ce45" table:formula="of:=[.C56]+[.C57]" office:value-type="float" office:value="5040" calcext:value-type="float">
            <text:p><text:s/>5,040 </text:p>
          </table:table-cell>
          <table:table-cell table:style-name="ce45" table:formula="of:=[.D56]+[.D57]" office:value-type="float" office:value="-7405.2" calcext:value-type="float">
            <text:p><text:s/>(7,405)</text:p>
          </table:table-cell>
          <table:table-cell table:style-name="ce45" table:formula="of:=[.E56]+[.E57]" office:value-type="float" office:value="-7405.2" calcext:value-type="float">
            <text:p><text:s/>(7,405)</text:p>
          </table:table-cell>
          <table:table-cell table:style-name="ce45" table:formula="of:=[.F56]+[.F57]" office:value-type="float" office:value="-7405.2" calcext:value-type="float">
            <text:p><text:s/>(7,405)</text:p>
          </table:table-cell>
          <table:table-cell table:style-name="ce45" table:formula="of:=[.G56]+[.G57]" office:value-type="float" office:value="-10285.2" calcext:value-type="float">
            <text:p><text:s/>(10,285)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Y. Crèdito Tributario (18)</text:p>
          </table:table-cell>
          <table:table-cell table:style-name="ce37" table:formula="of:=[.C58]" office:value-type="float" office:value="5040" calcext:value-type="float">
            <text:p><text:s/>5,040 </text:p>
          </table:table-cell>
          <table:table-cell table:style-name="ce31" table:number-columns-repeated="3"/>
          <table:table-cell table:style-name="ce90"/>
          <table:table-cell table:style-name="ce122"/>
          <table:table-cell table:style-name="ce124"/>
          <table:table-cell table:number-columns-repeated="16375"/>
        </table:table-row>
        <table:table-row table:style-name="ro1">
          <table:table-cell/>
          <table:table-cell table:style-name="ce18" office:value-type="string" calcext:value-type="string">
            <text:p>Z. PAGO DE IGV (19)</text:p>
          </table:table-cell>
          <table:table-cell table:style-name="ce33"/>
          <table:table-cell table:style-name="ce71" table:formula="of:=[.D58]-(-[.C58])" office:value-type="float" office:value="-2365.2" calcext:value-type="float">
            <text:p><text:s/>(2,365)</text:p>
          </table:table-cell>
          <table:table-cell table:style-name="ce71" table:formula="of:=[.E58]" office:value-type="float" office:value="-7405.2" calcext:value-type="float">
            <text:p><text:s/>(7,405)</text:p>
          </table:table-cell>
          <table:table-cell table:style-name="ce71" table:formula="of:=[.F58]" office:value-type="float" office:value="-7405.2" calcext:value-type="float">
            <text:p><text:s/>(7,405)</text:p>
          </table:table-cell>
          <table:table-cell table:style-name="ce71" table:formula="of:=[.G58]" office:value-type="float" office:value="-10285.2" calcext:value-type="float">
            <text:p><text:s/>(10,285)</text:p>
          </table:table-cell>
          <table:table-cell table:style-name="ce7" table:number-columns-repeated="2"/>
          <table:table-cell table:number-columns-repeated="16375"/>
        </table:table-row>
        <table:table-row table:style-name="ro1">
          <table:table-cell/>
          <table:table-cell table:style-name="ce19" office:value-type="string" calcext:value-type="string">
            <text:p>(15) V = -(G-F)</text:p>
          </table:table-cell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(16) W= -(U-N)</text:p>
          </table:table-cell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(17) X = V+W</text:p>
          </table:table-cell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(18) Si X &gt;0, Hay un crèdito tributario ( el IGV pagado es mayor que el que se debe pagar)</text:p>
          </table:table-cell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(19) <text:s/>Si no hay crèdito tributario, el pago es la diferencia (X) . Si hay credito tributario, se debe deducir este del</text:p>
          </table:table-cell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monto que se deberìa pagar, hasta que desaparezca <text:s/>dicho crèdito tributario.</text:p>
          </table:table-cell>
          <table:table-cell table:number-columns-repeated="16382"/>
        </table:table-row>
        <table:table-row table:style-name="ro1">
          <table:table-cell/>
          <table:table-cell table:style-name="ce20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4.- FINANCIAMIENTO NETO</text:p>
          </table:table-cell>
          <table:table-cell table:number-columns-repeated="16382"/>
        </table:table-row>
        <table:table-row table:style-name="ro1">
          <table:table-cell/>
          <table:table-cell table:style-name="ce20"/>
          <table:table-cell table:number-columns-repeated="16382"/>
        </table:table-row>
        <table:table-row table:style-name="ro1">
          <table:table-cell table:number-columns-repeated="2"/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>
            <text:p>PERIODO</text:p>
          </table:table-cell>
          <table:table-cell table:style-name="ce46" office:value-type="string" calcext:value-type="string">
            <text:p>Año 0</text:p>
          </table:table-cell>
          <table:table-cell table:style-name="ce73" office:value-type="string" office:string-value="Año 1" calcext:value-type="string">
            <text:p><text:s/>Año 1 </text:p>
          </table:table-cell>
          <table:table-cell table:style-name="ce73" office:value-type="string" office:string-value="Año 2" calcext:value-type="string">
            <text:p><text:s/>Año 2 </text:p>
          </table:table-cell>
          <table:table-cell table:style-name="ce73" office:value-type="string" office:string-value="Año3" calcext:value-type="string">
            <text:p><text:s/>Año3 </text:p>
          </table:table-cell>
          <table:table-cell table:style-name="ce104" office:value-type="string" office:string-value="Año 4" calcext:value-type="string">
            <text:p><text:s/>Año 4 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AA. Principal</text:p>
          </table:table-cell>
          <table:table-cell table:style-name="ce47" office:value-type="currency" office:currency="S/." office:value="10000" calcext:value-type="currency">
            <text:p><text:s/>S/. 10,000 </text:p>
          </table:table-cell>
          <table:table-cell table:style-name="ce74" table:number-columns-repeated="3"/>
          <table:table-cell table:style-name="ce105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AB. Amortizaciòn capital (20)</text:p>
          </table:table-cell>
          <table:table-cell table:style-name="ce48" office:value-type="float" office:value="0" calcext:value-type="float">
            <text:p>0</text:p>
          </table:table-cell>
          <table:table-cell table:style-name="ce75" table:formula="of:=-[.$C$72]/4" office:value-type="float" office:value="-2500" calcext:value-type="float">
            <text:p><text:s/>-2,500.0 </text:p>
          </table:table-cell>
          <table:table-cell table:style-name="ce75" table:formula="of:=-[.$C$72]/4" office:value-type="float" office:value="-2500" calcext:value-type="float">
            <text:p><text:s/>-2,500.0 </text:p>
          </table:table-cell>
          <table:table-cell table:style-name="ce75" table:formula="of:=-[.$C$72]/4" office:value-type="float" office:value="-2500" calcext:value-type="float">
            <text:p><text:s/>-2,500.0 </text:p>
          </table:table-cell>
          <table:table-cell table:style-name="ce106" table:formula="of:=-[.$C$72]/4" office:value-type="float" office:value="-2500" calcext:value-type="float">
            <text:p><text:s/>-2,500.0 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AC. Interes (21) </text:p>
          </table:table-cell>
          <table:table-cell table:style-name="ce48" office:value-type="float" office:value="0" calcext:value-type="float">
            <text:p>0</text:p>
          </table:table-cell>
          <table:table-cell table:style-name="ce76" table:formula="of:=-0.12*([.C72])" office:value-type="float" office:value="-1200" calcext:value-type="float">
            <text:p><text:s/>-1,200 </text:p>
          </table:table-cell>
          <table:table-cell table:style-name="ce76" table:formula="of:=-0.12*([.C72]+[.D73])" office:value-type="float" office:value="-900" calcext:value-type="float">
            <text:p><text:s/>-900 </text:p>
          </table:table-cell>
          <table:table-cell table:style-name="ce76" table:formula="of:=-0.12*([.C72]+[.E73]+[.D73])" office:value-type="float" office:value="-600" calcext:value-type="float">
            <text:p><text:s/>-600 </text:p>
          </table:table-cell>
          <table:table-cell table:style-name="ce107" table:formula="of:=-0.12*([.C72]+[.D73]+[.E73]+[.F73])" office:value-type="float" office:value="-300" calcext:value-type="float">
            <text:p><text:s/>-300 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AD. <text:s/>Escudo Fiscal (22)</text:p>
          </table:table-cell>
          <table:table-cell table:style-name="ce48" office:value-type="float" office:value="0" calcext:value-type="float">
            <text:p>0</text:p>
          </table:table-cell>
          <table:table-cell table:style-name="ce74" table:formula="of:=-0.3*([.D74])" office:value-type="float" office:value="360" calcext:value-type="float">
            <text:p><text:s/>360 </text:p>
          </table:table-cell>
          <table:table-cell table:style-name="ce74" table:formula="of:=-0.3*([.E74])" office:value-type="float" office:value="270" calcext:value-type="float">
            <text:p><text:s/>270 </text:p>
          </table:table-cell>
          <table:table-cell table:style-name="ce74" table:formula="of:=-0.3*([.F74])" office:value-type="float" office:value="180" calcext:value-type="float">
            <text:p><text:s/>180 </text:p>
          </table:table-cell>
          <table:table-cell table:style-name="ce105" table:formula="of:=-0.3*([.G74])" office:value-type="float" office:value="90" calcext:value-type="float">
            <text:p><text:s/>90 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AE.Financiamiento Neto</text:p>
          </table:table-cell>
          <table:table-cell table:style-name="ce49" table:formula="of:=[.C72]+[.C73]+[.C74]+[.C75]" office:value-type="currency" office:currency="S/." office:value="10000" calcext:value-type="currency">
            <text:p><text:s/>S/. 10,000 </text:p>
          </table:table-cell>
          <table:table-cell table:style-name="ce49" table:formula="of:=[.D72]+[.D73]+[.D74]+[.D75]" office:value-type="currency" office:currency="S/." office:value="-3340" calcext:value-type="currency">
            <text:p><text:s/>S/. -3,340 </text:p>
          </table:table-cell>
          <table:table-cell table:style-name="ce49" table:formula="of:=[.E72]+[.E73]+[.E74]+[.E75]" office:value-type="currency" office:currency="S/." office:value="-3130" calcext:value-type="currency">
            <text:p><text:s/>S/. -3,130 </text:p>
          </table:table-cell>
          <table:table-cell table:style-name="ce49" table:formula="of:=[.F72]+[.F73]+[.F74]+[.F75]" office:value-type="currency" office:currency="S/." office:value="-2920" calcext:value-type="currency">
            <text:p><text:s/>S/. -2,920 </text:p>
          </table:table-cell>
          <table:table-cell table:style-name="ce108" table:formula="of:=[.G72]+[.G73]+[.G74]+[.G75]" office:value-type="currency" office:currency="S/." office:value="-2710" calcext:value-type="currency">
            <text:p><text:s/>S/. -2,710 </text:p>
          </table:table-cell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0) AB =10,000/4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1) AC = -0.12* Saldo de la deuda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(22) AD = -0.30 * AC</text:p>
          </table:table-cell>
          <table:table-cell table:number-columns-repeated="16382"/>
        </table:table-row>
        <table:table-row table:style-name="ro1">
          <table:table-cell/>
          <table:table-cell table:style-name="ce20"/>
          <table:table-cell table:number-columns-repeated="16382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5.- ESTADO DE RESULTADOS ECONOMICO</text:p>
          </table:table-cell>
          <table:covered-table-cell table:number-columns-repeated="5" table:style-name="ce50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3" office:value-type="string" calcext:value-type="string">
            <text:p>RUBRO</text:p>
          </table:table-cell>
          <table:table-cell table:style-name="ce51"/>
          <table:table-cell table:style-name="ce51" office:value-type="string" calcext:value-type="string">
            <text:p>Año 1</text:p>
          </table:table-cell>
          <table:table-cell table:style-name="ce51" office:value-type="string" calcext:value-type="string">
            <text:p>Año 2</text:p>
          </table:table-cell>
          <table:table-cell table:style-name="ce51" office:value-type="string" calcext:value-type="string">
            <text:p>Año 3</text:p>
          </table:table-cell>
          <table:table-cell table:style-name="ce109" office:value-type="string" calcext:value-type="string">
            <text:p>Año 4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AF. Ingresos (23)</text:p>
          </table:table-cell>
          <table:table-cell table:style-name="ce45"/>
          <table:table-cell table:style-name="ce45" table:formula="of:=[.$G$10]" office:value-type="float" office:value="44340" calcext:value-type="float">
            <text:p><text:s/>44,340 </text:p>
          </table:table-cell>
          <table:table-cell table:style-name="ce45" table:formula="of:=[.$G$10]" office:value-type="float" office:value="44340" calcext:value-type="float">
            <text:p><text:s/>44,340 </text:p>
          </table:table-cell>
          <table:table-cell table:style-name="ce45" table:formula="of:=[.$G$10]" office:value-type="float" office:value="44340" calcext:value-type="float">
            <text:p><text:s/>44,340 </text:p>
          </table:table-cell>
          <table:table-cell table:style-name="ce96" table:formula="of:=[.$G$10]" office:value-type="float" office:value="44340" calcext:value-type="float">
            <text:p><text:s/>44,340 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AG. Costos de operación (24)</text:p>
          </table:table-cell>
          <table:table-cell table:style-name="ce31"/>
          <table:table-cell table:style-name="ce77" table:formula="of:=[.D25]" office:value-type="float" office:value="-13280" calcext:value-type="float">
            <text:p>-13,280</text:p>
          </table:table-cell>
          <table:table-cell table:style-name="ce77" table:formula="of:=[.E25]" office:value-type="float" office:value="-13280" calcext:value-type="float">
            <text:p>-13,280</text:p>
          </table:table-cell>
          <table:table-cell table:style-name="ce77" table:formula="of:=[.F25]" office:value-type="float" office:value="-13280" calcext:value-type="float">
            <text:p>-13,280</text:p>
          </table:table-cell>
          <table:table-cell table:style-name="ce95" table:formula="of:=[.G25]" office:value-type="float" office:value="-13280" calcext:value-type="float">
            <text:p>-13,280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AH. Depreciaciones (25)</text:p>
          </table:table-cell>
          <table:table-cell table:style-name="ce31"/>
          <table:table-cell table:style-name="ce45" table:formula="of:=-(-[.$C$23]-[.$G$23])/4" office:value-type="float" office:value="-3000" calcext:value-type="float">
            <text:p><text:s/>(3,000)</text:p>
          </table:table-cell>
          <table:table-cell table:style-name="ce45" table:formula="of:=-(-[.$C$23]-[.$G$23])/4" office:value-type="float" office:value="-3000" calcext:value-type="float">
            <text:p><text:s/>(3,000)</text:p>
          </table:table-cell>
          <table:table-cell table:style-name="ce45" table:formula="of:=-(-[.$C$23]-[.$G$23])/4" office:value-type="float" office:value="-3000" calcext:value-type="float">
            <text:p><text:s/>(3,000)</text:p>
          </table:table-cell>
          <table:table-cell table:style-name="ce96" table:formula="of:=-(-[.$C$23]-[.$G$23])/4" office:value-type="float" office:value="-3000" calcext:value-type="float">
            <text:p><text:s/>(3,000)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AI. Intereses (26)</text:p>
          </table:table-cell>
          <table:table-cell table:style-name="ce31"/>
          <table:table-cell table:number-columns-repeated="3" table:style-name="ce78" office:value-type="float" office:value="0" calcext:value-type="float">
            <text:p><text:s/>- <text:s text:c="2"/></text:p>
          </table:table-cell>
          <table:table-cell table:style-name="ce110" office:value-type="float" office:value="0" calcext:value-type="float">
            <text:p><text:s/>- <text:s text:c="2"/>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AJ. Utilidad Imponible (27)</text:p>
          </table:table-cell>
          <table:table-cell table:style-name="ce52"/>
          <table:table-cell table:style-name="ce38" table:formula="of:=[.D84]+[.D85]+[.D86]+[.D87]" office:value-type="float" office:value="28060" calcext:value-type="float">
            <text:p><text:s/>28,060 </text:p>
          </table:table-cell>
          <table:table-cell table:style-name="ce38" table:formula="of:=SUM([.E84:.E87])" office:value-type="float" office:value="28060" calcext:value-type="float">
            <text:p><text:s/>28,060 </text:p>
          </table:table-cell>
          <table:table-cell table:style-name="ce38" table:formula="of:=SUM([.F84:.F87])" office:value-type="float" office:value="28060" calcext:value-type="float">
            <text:p><text:s/>28,060 </text:p>
          </table:table-cell>
          <table:table-cell table:style-name="ce111" table:formula="of:=SUM([.G84:.G87])" office:value-type="float" office:value="28060" calcext:value-type="float">
            <text:p><text:s/>28,060 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AK. Impuesto a la Renta (28)</text:p>
          </table:table-cell>
          <table:table-cell table:style-name="ce31"/>
          <table:table-cell table:style-name="ce79" table:formula="of:=-0.3*[.D88]" office:value-type="float" office:value="-8418" calcext:value-type="float">
            <text:p>-8,418.0 </text:p>
          </table:table-cell>
          <table:table-cell table:style-name="ce79" table:formula="of:=-0.3*[.E88]" office:value-type="float" office:value="-8418" calcext:value-type="float">
            <text:p>-8,418.0 </text:p>
          </table:table-cell>
          <table:table-cell table:style-name="ce79" table:formula="of:=-0.3*[.F88]" office:value-type="float" office:value="-8418" calcext:value-type="float">
            <text:p>-8,418.0 </text:p>
          </table:table-cell>
          <table:table-cell table:style-name="ce112" table:formula="of:=-0.3*[.G88]" office:value-type="float" office:value="-8418" calcext:value-type="float">
            <text:p>-8,418.0 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AL. Utilidad Neta (29)</text:p>
          </table:table-cell>
          <table:table-cell table:style-name="ce33"/>
          <table:table-cell table:style-name="ce80" table:formula="of:=[.D88]+[.D89]" office:value-type="float" office:value="19642" calcext:value-type="float">
            <text:p><text:s/>19,642.0 </text:p>
          </table:table-cell>
          <table:table-cell table:style-name="ce80" table:formula="of:=[.E88]+[.E89]" office:value-type="float" office:value="19642" calcext:value-type="float">
            <text:p><text:s/>19,642.0 </text:p>
          </table:table-cell>
          <table:table-cell table:style-name="ce80" table:formula="of:=[.F88]+[.F89]" office:value-type="float" office:value="19642" calcext:value-type="float">
            <text:p><text:s/>19,642.0 </text:p>
          </table:table-cell>
          <table:table-cell table:style-name="ce113" table:formula="of:=[.G88]+[.G89]" office:value-type="float" office:value="19642" calcext:value-type="float">
            <text:p><text:s/>19,642.0 </text:p>
          </table:table-cell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3) AF = F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4) AG = I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5) AH = (28,000-16,000)/4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6) AI = AC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7) AJ= AF+AG+AH+AI</text:p>
          </table:table-cell>
          <table:table-cell table:style-name="ce7"/>
          <table:table-cell table:style-name="ce81" table:number-columns-repeated="4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8) AK = -0.3*AJ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29) AL = AJ+AK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6.- FLUJOS DE CAJA</text:p>
          </table:table-cell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7"/>
          <table:table-cell table:style-name="ce72" table:number-columns-repeated="4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5" office:value-type="string" calcext:value-type="string" table:number-columns-spanned="1" table:number-rows-spanned="2">
            <text:p>RUBROS</text:p>
          </table:table-cell>
          <table:table-cell table:style-name="ce53" office:value-type="string" calcext:value-type="string" table:number-columns-spanned="5" table:number-rows-spanned="1">
            <text:p>PERIODOS</text:p>
          </table:table-cell>
          <table:covered-table-cell table:number-columns-repeated="3" table:style-name="ce82"/>
          <table:covered-table-cell table:style-name="ce114"/>
          <table:table-cell table:number-columns-repeated="16377"/>
        </table:table-row>
        <table:table-row table:style-name="ro1">
          <table:table-cell/>
          <table:covered-table-cell table:style-name="ce26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23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M. Flujo de caja de inversiòn y liq.(30)</text:p>
          </table:table-cell>
          <table:table-cell table:style-name="ce55" table:formula="of:=[.C32]" office:value-type="float" office:value="-37474" calcext:value-type="float">
            <text:p>-37,474</text:p>
          </table:table-cell>
          <table:table-cell table:style-name="ce55" table:formula="of:=[.D32]" office:value-type="float" office:value="0" calcext:value-type="float">
            <text:p>0</text:p>
          </table:table-cell>
          <table:table-cell table:style-name="ce55" table:formula="of:=[.E32]" office:value-type="float" office:value="0" calcext:value-type="float">
            <text:p>0</text:p>
          </table:table-cell>
          <table:table-cell table:style-name="ce55" table:formula="of:=[.F32]" office:value-type="float" office:value="0" calcext:value-type="float">
            <text:p>0</text:p>
          </table:table-cell>
          <table:table-cell table:style-name="ce116" table:formula="of:=[.G32]" office:value-type="float" office:value="23314" calcext:value-type="float">
            <text:p>23,314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AN. Incremento en KW </text:p>
          </table:table-cell>
          <table:table-cell table:style-name="ce56" table:formula="of:=[.C34]" office:value-type="float" office:value="-4434" calcext:value-type="float">
            <text:p>-4,434</text:p>
          </table:table-cell>
          <table:table-cell table:style-name="ce56" table:formula="of:=[.D34]" office:value-type="float" office:value="0" calcext:value-type="float">
            <text:p>0</text:p>
          </table:table-cell>
          <table:table-cell table:style-name="ce56" table:formula="of:=[.E34]" office:value-type="float" office:value="0" calcext:value-type="float">
            <text:p>0</text:p>
          </table:table-cell>
          <table:table-cell table:style-name="ce56" table:formula="of:=[.F34]" office:value-type="float" office:value="0" calcext:value-type="float">
            <text:p>0</text:p>
          </table:table-cell>
          <table:table-cell table:style-name="ce117" table:formula="of:=[.G34]" office:value-type="float" office:value="4434" calcext:value-type="float">
            <text:p>4,434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AO. Flujo de caja de Ingresos (31)</text:p>
          </table:table-cell>
          <table:table-cell table:style-name="ce56"/>
          <table:table-cell table:style-name="ce56" table:formula="of:=[.$G$11]" office:value-type="float" office:value="52321.2" calcext:value-type="float">
            <text:p>52,321</text:p>
          </table:table-cell>
          <table:table-cell table:style-name="ce56" table:formula="of:=[.$G$11]" office:value-type="float" office:value="52321.2" calcext:value-type="float">
            <text:p>52,321</text:p>
          </table:table-cell>
          <table:table-cell table:style-name="ce56" table:formula="of:=[.$G$11]" office:value-type="float" office:value="52321.2" calcext:value-type="float">
            <text:p>52,321</text:p>
          </table:table-cell>
          <table:table-cell table:style-name="ce117" table:formula="of:=[.$G$11]" office:value-type="float" office:value="52321.2" calcext:value-type="float">
            <text:p>52,321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AP. Flujo de caja de costos (32)</text:p>
          </table:table-cell>
          <table:table-cell table:style-name="ce56"/>
          <table:table-cell table:style-name="ce56" table:formula="of:=[.D35]" office:value-type="float" office:value="-13856" calcext:value-type="float">
            <text:p>-13,856</text:p>
          </table:table-cell>
          <table:table-cell table:style-name="ce56" table:formula="of:=[.E35]" office:value-type="float" office:value="-13856" calcext:value-type="float">
            <text:p>-13,856</text:p>
          </table:table-cell>
          <table:table-cell table:style-name="ce56" table:formula="of:=[.F35]" office:value-type="float" office:value="-13856" calcext:value-type="float">
            <text:p>-13,856</text:p>
          </table:table-cell>
          <table:table-cell table:style-name="ce117" table:formula="of:=[.G35]" office:value-type="float" office:value="-13856" calcext:value-type="float">
            <text:p>-13,856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AQ. Pago de IGV (33)</text:p>
          </table:table-cell>
          <table:table-cell table:style-name="ce56"/>
          <table:table-cell table:style-name="ce56" table:formula="of:=[.D60]" office:value-type="float" office:value="-2365.2" calcext:value-type="float">
            <text:p>-2,365</text:p>
          </table:table-cell>
          <table:table-cell table:style-name="ce56" table:formula="of:=[.E60]" office:value-type="float" office:value="-7405.2" calcext:value-type="float">
            <text:p>-7,405</text:p>
          </table:table-cell>
          <table:table-cell table:style-name="ce56" table:formula="of:=[.F60]" office:value-type="float" office:value="-7405.2" calcext:value-type="float">
            <text:p>-7,405</text:p>
          </table:table-cell>
          <table:table-cell table:style-name="ce117" table:formula="of:=[.G60]" office:value-type="float" office:value="-10285.2" calcext:value-type="float">
            <text:p>-10,285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AR. Impuesto a la renta (34)</text:p>
          </table:table-cell>
          <table:table-cell table:style-name="ce56"/>
          <table:table-cell table:style-name="ce56" table:formula="of:=[.D89]" office:value-type="float" office:value="-8418" calcext:value-type="float">
            <text:p>-8,418</text:p>
          </table:table-cell>
          <table:table-cell table:style-name="ce56" table:formula="of:=[.E89]" office:value-type="float" office:value="-8418" calcext:value-type="float">
            <text:p>-8,418</text:p>
          </table:table-cell>
          <table:table-cell table:style-name="ce56" table:formula="of:=[.F89]" office:value-type="float" office:value="-8418" calcext:value-type="float">
            <text:p>-8,418</text:p>
          </table:table-cell>
          <table:table-cell table:style-name="ce56" table:formula="of:=[.G89]" office:value-type="float" office:value="-8418" calcext:value-type="float">
            <text:p>-8,418</text:p>
          </table:table-cell>
          <table:table-cell table:number-columns-repeated="16377"/>
        </table:table-row>
        <table:table-row table:style-name="ro1">
          <table:table-cell/>
          <table:table-cell table:style-name="ce27" office:value-type="string" calcext:value-type="string">
            <text:p>AS. FC Económico (FCE) (35)</text:p>
          </table:table-cell>
          <table:table-cell table:style-name="ce57" table:formula="of:=[.C104]+[.C105]+[.C106]+[.C107]+[.C108]+[.C109]" office:value-type="float" office:value="-41908" calcext:value-type="float">
            <text:p>-41,908.0</text:p>
          </table:table-cell>
          <table:table-cell table:style-name="ce57" table:formula="of:=[.D104]+[.D105]+[.D106]+[.D107]+[.D108]+[.D109]" office:value-type="float" office:value="27682" calcext:value-type="float">
            <text:p>27,682.0</text:p>
          </table:table-cell>
          <table:table-cell table:style-name="ce57" table:formula="of:=[.E104]+[.E105]+[.E106]+[.E107]+[.E108]+[.E109]" office:value-type="float" office:value="22642" calcext:value-type="float">
            <text:p>22,642.0</text:p>
          </table:table-cell>
          <table:table-cell table:style-name="ce57" table:formula="of:=[.F104]+[.F105]+[.F106]+[.F107]+[.F108]+[.F109]" office:value-type="float" office:value="22642" calcext:value-type="float">
            <text:p>22,642.0</text:p>
          </table:table-cell>
          <table:table-cell table:style-name="ce118" table:formula="of:=[.G104]+[.G105]+[.G106]+[.G107]+[.G108]+[.G109]" office:value-type="float" office:value="47510" calcext:value-type="float">
            <text:p>47,510.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AT. FC Financiamiento Neto (FCD)(36)</text:p>
          </table:table-cell>
          <table:table-cell table:style-name="ce58" table:formula="of:=[.C76]" office:value-type="float" office:value="10000" calcext:value-type="float">
            <text:p>10,000.00</text:p>
          </table:table-cell>
          <table:table-cell table:style-name="ce58" table:formula="of:=[.D76]" office:value-type="float" office:value="-3340" calcext:value-type="float">
            <text:p>-3,340.00</text:p>
          </table:table-cell>
          <table:table-cell table:style-name="ce58" table:formula="of:=[.E76]" office:value-type="float" office:value="-3130" calcext:value-type="float">
            <text:p>-3,130.00</text:p>
          </table:table-cell>
          <table:table-cell table:style-name="ce58" table:formula="of:=[.F76]" office:value-type="float" office:value="-2920" calcext:value-type="float">
            <text:p>-2,920.00</text:p>
          </table:table-cell>
          <table:table-cell table:style-name="ce119" table:formula="of:=[.G76]" office:value-type="float" office:value="-2710" calcext:value-type="float">
            <text:p>-2,710.00</text:p>
          </table:table-cell>
          <table:table-cell table:number-columns-repeated="16377"/>
        </table:table-row>
        <table:table-row table:style-name="ro1">
          <table:table-cell/>
          <table:table-cell table:style-name="ce28" office:value-type="string" calcext:value-type="string">
            <text:p>AU. FCFinanciero (FCF) (37)</text:p>
          </table:table-cell>
          <table:table-cell table:style-name="ce59" table:formula="of:=[.C110]+[.C111]" office:value-type="float" office:value="-31908" calcext:value-type="float">
            <text:p>-31,908.0</text:p>
          </table:table-cell>
          <table:table-cell table:style-name="ce59" table:formula="of:=[.D110]+[.D111]" office:value-type="float" office:value="24342" calcext:value-type="float">
            <text:p>24,342.0</text:p>
          </table:table-cell>
          <table:table-cell table:style-name="ce59" table:formula="of:=[.E110]+[.E111]" office:value-type="float" office:value="19512" calcext:value-type="float">
            <text:p>19,512.0</text:p>
          </table:table-cell>
          <table:table-cell table:style-name="ce59" table:formula="of:=[.F110]+[.F111]" office:value-type="float" office:value="19722" calcext:value-type="float">
            <text:p>19,722.0</text:p>
          </table:table-cell>
          <table:table-cell table:style-name="ce120" table:formula="of:=[.G110]+[.G111]" office:value-type="float" office:value="44800" calcext:value-type="float">
            <text:p>44,800.0</text:p>
          </table:table-cell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30) AM = O</text:p>
          </table:table-cell>
          <table:table-cell table:style-name="ce20" table:number-columns-repeated="5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31) AO = G</text:p>
          </table:table-cell>
          <table:table-cell table:style-name="ce20" table:number-columns-repeated="5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32) AP = P</text:p>
          </table:table-cell>
          <table:table-cell table:style-name="ce16" table:number-columns-repeated="5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33) AQ =Z</text:p>
          </table:table-cell>
          <table:table-cell table:style-name="ce60" table:number-columns-repeated="5"/>
          <table:table-cell table:number-columns-repeated="16377"/>
        </table:table-row>
        <table:table-row table:style-name="ro1">
          <table:table-cell/>
          <table:table-cell table:style-name="ce20" office:value-type="string" calcext:value-type="string">
            <text:p>(34) AR = AK-AD .No hay utilidad en la venta del camiòn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(35) AS = AM+AN+AO+AP+AQ+AR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(36) AT = AE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(37) AU = AS+AT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36P1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36P2" style:volatile="true">
      <number:text loext:blank-width-char=" "> </number:text>
      <number:currency-symbol number:language="es" number:country="PE">S/.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 "> </number:text>
      <number:fill-character> </number:fill-character>
      <number:number number:decimal-places="4" number:min-decimal-places="4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4" number:min-decimal-places="4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1" loext:max-blank-integer-digits="1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lujos" style:display-name="PageStyle_fluj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onomia</meta:initial-creator>
    <dc:creator>EDISON ACHALMA</dc:creator>
    <meta:print-date>2000-01-13T20:45:18</meta:print-date>
    <meta:creation-date>1999-04-23T15:11:18</meta:creation-date>
    <dc:date>2021-08-04T00:27:57</dc:date>
    <meta:generator>LibreOffice/24.2.4.2$Linux_X86_64 LibreOffice_project/420$Build-2</meta:generator>
    <meta:document-statistic meta:table-count="1" meta:cell-count="323" meta:object-count="0"/>
    <meta:user-defined meta:name="AppVersion">16.0300</meta:user-defined>
    <meta:user-defined meta:name="Company">UNIVERSIDAD DE LOS ANDES</meta:user-defined>
  </office:meta>
</office:document-meta>
</file>