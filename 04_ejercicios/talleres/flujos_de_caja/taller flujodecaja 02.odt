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justify" style:justify-single-word="false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size="12pt" style:font-size-asian="12pt" style:font-name-complex="Arial1" style:font-size-complex="12pt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font-name-complex="Arial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Arial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 loext:marker-style-name="T2"><text:span text:style-name="T1">TALLER FC- 02</text:span><text:span text:style-name="T1"/></text:p>
        <text:p text:style-name="P2" loext:marker-style-name="T2"><text:span text:style-name="T4">FÁBRICA DE TABLETAS PARA PISOS</text:span><text:span text:style-name="T4"/></text:p>
        <text:p text:style-name="P3" loext:marker-style-name="T2"><text:span text:style-name="T5">a) Proyecto puro</text:span><text:span text:style-name="T5"/></text:p>
        <text:p text:style-name="P3" loext:marker-style-name="T2"><text:span text:style-name="T3">Un grupo de inversionistas tiene en mente la instalación y explotación de una fábrica de tabletas para piso. De acuerdo con las proyecciones realizadas, para iniciar el proyecto se ha estimado un periodo de programación, planeación e instalación de un año (año cero). La empresa operará durante cinco años. Se proyecta una tasa de inflación de 3% promedio anual durante el horizonte de evaluación del proyecto.</text:span><text:span text:style-name="T3"/></text:p>
        <text:p text:style-name="P3" loext:marker-style-name="T2"><text:span text:style-name="T3">Durante el primer año de operación (año 1), la producción alcanzará tan sólo el 50% de la capacidad instalada, es decir, 8,000 m2 anuales de tabletas. A partir del segundo año de operaciones, la empresa utilizará el 100% de la capacidad (años 2 al 5), es decir, 16,000 m2 anuales de tabletas.</text:span><text:span text:style-name="T3"/></text:p>
        <text:p text:style-name="P3" loext:marker-style-name="T2"><text:span text:style-name="T3">De acuerdo con el estudio de mercado, la demanda del producto superará durante la vida del proyecto, la producción estimada del mismo. Por tal razón, igualamos la producción a las ventas. El precio de venta de la tableta actualmente es de S/. 150 por m2.</text:span><text:span text:style-name="T3"/></text:p>
        <text:p text:style-name="P3" loext:marker-style-name="T2"><text:span text:style-name="T3">Las inversiones (en miles de soles) requeridas en este momento para la instalación de la planta comprenden los siguientes elementos:</text:span><text:span text:style-name="T3"/></text:p>
        <text:p text:style-name="P1" loext:marker-style-name="T2"><text:span text:style-name="T2"><text:s/></text:span><text:span text:style-name="T5">Año 0 Año 1</text:span></text:p>
        <text:p text:style-name="P1" loext:marker-style-name="T2"><text:span text:style-name="T3">Estudios previos 300</text:span><text:span text:style-name="T3"/></text:p>
        <text:p text:style-name="P1" loext:marker-style-name="T2"><text:span text:style-name="T3">Adquisición de terrenos 700</text:span><text:span text:style-name="T3"/></text:p>
        <text:p text:style-name="P1" loext:marker-style-name="T2"><text:span text:style-name="T3">Construcción de edificios 1700</text:span><text:span text:style-name="T3"/></text:p>
        <text:p text:style-name="P1" loext:marker-style-name="T2"><text:span text:style-name="T3">Adquisición de equipos 3000 1000</text:span><text:span text:style-name="T3"/></text:p>
        <text:p text:style-name="P3" loext:marker-style-name="T2"><text:span text:style-name="T3">El grupo de inversionistas ha estimado que requerirá un monto total por concepto de capital de trabajo igual a S/. 300,000 en el año cero. A partir del año 1, este monto ascenderá a S/. 600,000 anuales. Los costos de operación, administración y ventas son (en miles de soles):</text:span><text:span text:style-name="T3"/></text:p>
        <text:p text:style-name="P3" loext:marker-style-name="T2"><text:span text:style-name="T3"><text:s/></text:span><text:span text:style-name="T5">Año 1 Año 2-5</text:span></text:p>
        <text:p text:style-name="P1" loext:marker-style-name="T2"><text:span text:style-name="T3">Mano de obra 75 150</text:span><text:span text:style-name="T3"/></text:p>
        <text:p text:style-name="P1" loext:marker-style-name="T2"><text:span text:style-name="T3">Materia prima y combustible 90 180</text:span><text:span text:style-name="T3"/></text:p>
        <text:p text:style-name="P1" loext:marker-style-name="T2"><text:span text:style-name="T3">Mantenimiento y repuestos 15 30</text:span><text:span text:style-name="T3"/></text:p>
        <text:p text:style-name="P1" loext:marker-style-name="T2"><text:span text:style-name="T3">Gastos indirectos de Fabricación 15 30</text:span><text:span text:style-name="T3"/></text:p>
        <text:p text:style-name="P1" loext:marker-style-name="T2"><text:span text:style-name="T3">Gastos de administración 75 150</text:span><text:span text:style-name="T3"/></text:p>
        <text:p text:style-name="P1" loext:marker-style-name="T2"><text:span text:style-name="T3">Gastos de ventas 30 60</text:span><text:span text:style-name="T3"/></text:p>
        <text:p text:style-name="P3" loext:marker-style-name="T2"><text:span text:style-name="T3">Se ha estimado, igualmente, que el precio de venta de los equipos al momento de la liquidación del proyecto será de S/. 600,000; las instalaciones se venderán en el mismo momento a un precio de S/. 2`500,000.</text:span><text:span text:style-name="T3"/></text:p>
        <text:p text:style-name="P3" loext:marker-style-name="T2"><text:span text:style-name="T3">La tasa de impuesto a la renta y a las ganancias extraordinarias que cobra el gobierno es del 15%. La depreciación permitida por la legislación fiscal nacional es de tipo lineal, empleando una vida de 20 años para los edificios y de 10 años para equipos</text:span><text:span text:style-name="T3"/></text:p>
        <text:p text:style-name="P3" loext:marker-style-name="T2"><text:span text:style-name="T5">b) Proyecto financiado</text:span><text:span text:style-name="T5"/></text:p>
        <text:p text:style-name="P3" loext:marker-style-name="T2"><text:span text:style-name="T3">Los dueños del proyecto recibirán un préstamo bancario de S/. 3`000,000 en el año 0 para financiar los costos iniciales del proyecto.</text:span><text:span text:style-name="T3"/></text:p>
        <text:p text:style-name="P3" loext:marker-style-name="T2"><text:span text:style-name="T3">Se ha estipulado que el préstamo se amortizará desde el primer año de operación del proyecto, en cinco cuotas iguales.</text:span><text:span text:style-name="T3"/></text:p>
        <text:p text:style-name="P3" loext:marker-style-name="T2"><text:soft-page-break/><text:span text:style-name="T3">Adicionalmente, se ha estipulado un interés efectiva anual del 15%, sobre saldos. En estas condiciones:</text:span><text:span text:style-name="T3"/></text:p>
        <text:p text:style-name="P3" loext:marker-style-name="T2"><text:span text:style-name="T3">Elabore los flujos de caja económico y financiero</text:span><text:span text:style-name="T3"/></text:p>
        <text:p text:style-name="P4" loext:marker-style-name="T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0pt" style:rfc-language-tag="es-ES-u-co-trad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MX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style:font-name="Arial" fo:font-family="Arial" style:font-family-generic="roman" fo:font-size="11pt" style:text-underline-style="solid" style:text-underline-width="auto" style:text-underline-color="font-color" fo:font-weight="bold" style:font-size-asian="11pt" style:font-weight-asian="bold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0pt" style:rfc-language-tag="es-ES-u-co-trad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MX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01cm" fo:margin-bottom="2.501cm" fo:margin-left="3cm" fo:margin-right="3cm" style:writing-mode="lr-tb" style:layout-grid-color="#c0c0c0" style:layout-grid-lines="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6:55:00</meta:creation-date>
    <meta:initial-creator>AYACUCHO</meta:initial-creator>
    <dc:language>es-PE</dc:language>
    <dc:creator>Elmer Edison Achalma Mendoza</dc:creator>
    <meta:print-date>1999-04-22T22:41:00</meta:print-date>
    <dc:date>2023-12-31T17:42:39</dc:date>
    <meta:editing-cycles>3</meta:editing-cycles>
    <dc:title>4. Fábrica de tabletas para pisos</dc:title>
    <meta:editing-duration>P0D</meta:editing-duration>
    <meta:generator>LibreOffice/24.2.4.2$Linux_X86_64 LibreOffice_project/420$Build-2</meta:generator>
    <meta:document-statistic meta:table-count="0" meta:image-count="0" meta:object-count="0" meta:page-count="2" meta:paragraph-count="27" meta:word-count="450" meta:character-count="2619" meta:non-whitespace-character-count="2194"/>
    <meta:user-defined meta:name="AppVersion">15.0000</meta:user-defined>
    <meta:user-defined meta:name="Company">UNIVERSIDAD DE LOS ANDES</meta:user-defined>
    <meta:template xlink:type="simple" xlink:actuate="onRequest" xlink:title="ejer-flujofondos.dot" xlink:href=""/>
  </office:meta>
</office:document-meta>
</file>