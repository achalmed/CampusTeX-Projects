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5.034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4.251cm"/>
    </style:style>
    <style:style style:name="co11" style:family="table-column">
      <style:table-column-properties fo:break-before="auto" style:column-width="4.782cm"/>
    </style:style>
    <style:style style:name="co12" style:family="table-column">
      <style:table-column-properties fo:break-before="auto" style:column-width="1.649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1.538cm"/>
    </style:style>
    <style:style style:name="co15" style:family="table-column">
      <style:table-column-properties fo:break-before="auto" style:column-width="2.097cm"/>
    </style:style>
    <style:style style:name="co16" style:family="table-column">
      <style:table-column-properties fo:break-before="auto" style:column-width="1.762cm"/>
    </style:style>
    <style:style style:name="co17" style:family="table-column">
      <style:table-column-properties fo:break-before="auto" style:column-width="6.657cm"/>
    </style:style>
    <style:style style:name="co18" style:family="table-column">
      <style:table-column-properties fo:break-before="auto" style:column-width="2.852cm"/>
    </style:style>
    <style:style style:name="co19" style:family="table-column">
      <style:table-column-properties fo:break-before="auto" style:column-width="3.468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574cm"/>
    </style:style>
    <style:style style:name="co23" style:family="table-column">
      <style:table-column-properties fo:break-before="auto" style:column-width="2.824cm"/>
    </style:style>
    <style:style style:name="co24" style:family="table-column">
      <style:table-column-properties fo:break-before="auto" style:column-width="6.152cm"/>
    </style:style>
    <style:style style:name="co25" style:family="table-column">
      <style:table-column-properties fo:break-before="auto" style:column-width="3.048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0.616cm"/>
    </style:style>
    <style:style style:name="co29" style:family="table-column">
      <style:table-column-properties fo:break-before="auto" style:column-width="2.406cm"/>
    </style:style>
    <style:style style:name="co30" style:family="table-column">
      <style:table-column-properties fo:break-before="auto" style:column-width="1.79cm"/>
    </style:style>
    <style:style style:name="co31" style:family="table-column">
      <style:table-column-properties fo:break-before="auto" style:column-width="2.937cm"/>
    </style:style>
    <style:style style:name="co32" style:family="table-column">
      <style:table-column-properties fo:break-before="auto" style:column-width="5.622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Deprec._20_y_20_VR">
      <style:table-properties table:display="true" style:writing-mode="lr-tb"/>
    </style:style>
    <style:style style:name="ta2" style:family="table" style:master-page-name="PageStyle_5f_Planillas">
      <style:table-properties table:display="true" style:writing-mode="lr-tb"/>
    </style:style>
    <style:style style:name="ta3" style:family="table" style:master-page-name="PageStyle_5f_FC_20_Economico">
      <style:table-properties table:display="true" style:writing-mode="lr-tb"/>
    </style:style>
    <style:style style:name="ta4" style:family="table" style:master-page-name="PageStyle_5f_DEUDA">
      <style:table-properties table:display="true" style:writing-mode="lr-tb"/>
    </style:style>
    <style:style style:name="ta5" style:family="table" style:master-page-name="PageStyle_5f_FCD_20_Y_20_FCF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9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order-bottom="1.76pt solid #000000" fo:background-color="#c0c0c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48" style:family="table-cell" style:parent-style-name="Default" style:data-style-name="N1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1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none" fo:background-color="#c0c0c0" style:diagonal-bl-tr="none" style:diagonal-tl-br="none" fo:border-left="1.76pt solid #000000" fo:border-right="none" style:rotation-align="none" fo:border-top="1.76pt solid #000000"/>
    </style:style>
    <style:style style:name="ce52" style:family="table-cell" style:parent-style-name="Default">
      <style:table-cell-properties fo:border-bottom="1.76pt solid #000000" fo:background-color="#c0c0c0" style:diagonal-bl-tr="none" style:diagonal-tl-br="none" fo:border-left="1.76pt solid #000000" fo:border-right="none" style:rotation-align="none" fo:border-top="none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fo:border-bottom="1.76pt solid #000000" fo:background-color="#c0c0c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9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33">
      <style:table-cell-properties style:diagonal-bl-tr="none" style:diagonal-tl-br="none" fo:border="0.74pt solid #000000" style:rotation-align="none"/>
    </style:style>
    <style:style style:name="ce61" style:family="table-cell" style:parent-style-name="Default" style:data-style-name="N133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5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66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8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Comma" style:data-style-name="N135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3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135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none" fo:background-color="#c0c0c0" style:diagonal-bl-tr="none" style:diagonal-tl-br="none" fo:border-left="none" fo:border-right="none" style:rotation-align="none" fo:border-top="1.76pt solid #000000"/>
    </style:style>
    <style:style style:name="ce73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none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fo:border-bottom="1.76pt solid #000000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0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3">
      <style:table-cell-properties style:rotation-align="none"/>
    </style:style>
    <style:style style:name="ce85" style:family="table-cell" style:parent-style-name="Default">
      <style:table-cell-properties fo:border-bottom="none" fo:background-color="#c0c0c0" style:diagonal-bl-tr="none" style:diagonal-tl-br="none" fo:border-left="0.74pt solid #000000" fo:border-right="1.76pt solid #000000" style:rotation-align="none" fo:border-top="1.76pt solid #000000"/>
    </style:style>
    <style:style style:name="ce86" style:family="table-cell" style:parent-style-name="Default">
      <style:table-cell-properties fo:border-bottom="1.76pt solid #000000" fo:background-color="#c0c0c0" style:diagonal-bl-tr="none" style:diagonal-tl-br="none" fo:border-left="0.74pt solid #000000" fo:border-right="1.76pt solid #000000" style:rotation-align="none" fo:border-top="none"/>
    </style:style>
    <style:style style:name="ce8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88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13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90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3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97" style:family="table-cell" style:parent-style-name="Default">
      <style:table-cell-properties fo:border-bottom="1.76pt solid #000000" fo:background-color="#c0c0c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9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9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00" style:family="table-cell" style:parent-style-name="Default" style:data-style-name="N1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0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0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05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3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07" style:family="table-cell" style:parent-style-name="Default" style:data-style-name="N133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08" style:family="table-cell" style:parent-style-name="Default" style:data-style-name="N133">
      <style:table-cell-properties style:rotation-align="none"/>
    </style:style>
    <style:style style:name="ce10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1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0">
      <style:table-cell-properties style:rotation-align="none"/>
    </style:style>
    <style:style style:name="ce11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Excel_20_Built-in_20_Comma" style:data-style-name="N13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Excel_20_Built-in_20_Comma" style:data-style-name="N135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35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1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135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">
      <style:table-cell-properties style:rotation-align="none"/>
    </style:style>
    <style:style style:name="ce136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139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144" style:family="table-cell" style:parent-style-name="Default" style:data-style-name="N1">
      <style:table-cell-properties fo:background-color="#ffffff" style:rotation-align="none">
        <loext:background-complex-color loext:theme-type="light1" loext:color-type="theme"/>
      </style:table-cell-properties>
    </style:style>
    <style:style style:name="ce145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Percent" style:data-style-name="N13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 style:data-style-name="N135">
      <style:table-cell-properties fo:background-color="#ffffff" style:rotation-align="none">
        <loext:background-complex-color loext:theme-type="light1" loext:color-type="theme"/>
      </style:table-cell-properties>
    </style:style>
    <style:style style:name="ce15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2" style:family="table-cell" style:parent-style-name="Default" style:data-style-name="N1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55" style:family="table-cell" style:parent-style-name="Default" style:data-style-name="N135">
      <style:table-cell-properties style:diagonal-bl-tr="none" style:diagonal-tl-br="none" fo:border="0.74pt solid #000000" style:rotation-align="none"/>
    </style:style>
    <style:style style:name="ce156" style:family="table-cell" style:parent-style-name="Default">
      <style:table-cell-properties fo:border-bottom="0.74pt solid #000000" fo:background-color="#40404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57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bfbfb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40404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63" style:family="table-cell" style:parent-style-name="Default" style:data-style-name="N133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 style:data-style-name="N1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 style:data-style-name="N133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40404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67" style:family="table-cell" style:parent-style-name="Default" style:data-style-name="N133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 style:data-style-name="N1">
      <style:table-cell-properties fo:border-bottom="0.74pt solid #000000" fo:background-color="#bfbfb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 style:data-style-name="N133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6.321cm" loext:decorative="false"/>
      <style:paragraph-properties style:writing-mode="lr-tb" fo:text-align="start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783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1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7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7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gr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17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39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9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4.19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10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39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</style:style>
    <style:style style:name="P3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prec. y V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number-columns-repeated="16373" table:default-cell-style-name="Default"/>
        <table:table-row table:style-name="ro1">
          <table:table-cell/>
          <table:table-cell table:style-name="ce1" office:value-type="string" calcext:value-type="string" table:number-columns-spanned="10" table:number-rows-spanned="1">
            <text:p>DEPRECIACIÓN Y VALOR DE RECUPERO</text:p>
          </table:table-cell>
          <table:covered-table-cell table:number-columns-repeated="9" table:style-name="ce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2" office:value-type="string" calcext:value-type="string">
            <text:p>Deprec. Anual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Activo fijo</text:p>
          </table:table-cell>
          <table:table-cell table:style-name="ce2" office:value-type="string" calcext:value-type="string">
            <text:p>Valor Compra</text:p>
          </table:table-cell>
          <table:table-cell table:style-name="ce2" office:value-type="string" calcext:value-type="string">
            <text:p>Vida util</text:p>
          </table:table-cell>
          <table:table-cell table:style-name="ce2" office:value-type="string" calcext:value-type="string">
            <text:p>Tasa</text:p>
          </table:table-cell>
          <table:table-cell table:style-name="ce13" office:value-type="string" calcext:value-type="string">
            <text:p>Año 1 - 6</text:p>
          </table:table-cell>
          <table:table-cell table:style-name="ce13" office:value-type="string" calcext:value-type="string">
            <text:p>Año 7 - 8</text:p>
          </table:table-cell>
          <table:table-cell table:style-name="ce2" office:value-type="string" calcext:value-type="string">
            <text:p>Dep. Acum.</text:p>
          </table:table-cell>
          <table:table-cell table:style-name="ce2" office:value-type="string" calcext:value-type="string">
            <text:p>Valor comercial</text:p>
          </table:table-cell>
          <table:table-cell table:style-name="ce2" office:value-type="string" calcext:value-type="string">
            <office:annotation draw:style-name="gr1" draw:text-style-name="P1" svg:width="3.694cm" svg:height="2.01cm" svg:x="24.892cm" svg:y="1.138cm" draw:caption-point-x="1.331cm" draw:caption-point-y="0.221cm">
              <dc:creator>Edison Achalma Mendoza</dc:creator>
              <dc:date>2024-07-31T03:29:00</dc:date>
              <text:p>Edison:</text:p>
              <text:p><text:span text:style-name="T1">Este es el Valor de Recupero</text:span></text:p>
              <text:p><text:span text:style-name="T1"/></text:p>
            </office:annotation>
            <text:p>Valor en libros</text:p>
          </table:table-cell>
          <table:table-cell table:style-name="ce2" office:value-type="string" calcext:value-type="string">
            <office:annotation draw:style-name="gr2" draw:text-style-name="P2" svg:width="4.09cm" svg:height="6.521cm" svg:x="28.032cm" svg:y="1.085cm" draw:caption-point-x="1.184cm" draw:caption-point-y="0.274cm">
              <dc:creator>Edison Achalma Mendoza</dc:creator>
              <dc:date>2024-07-31T03:29:00</dc:date>
              <text:p>[Threaded comment]</text:p>
              <text:p/>
              <text:p>Your version of Excel allows you to read this threaded comment; however, any edits to it will get removed if the file is opened in a newer version of Excel. Learn more: https://go.microsoft.com/fwlink/?linkid=870924</text:p>
              <text:p/>
              <text:p>Comment:</text:p>
              <text:p><text:s text:c="4"/>Esto es para el tratamiento tributario</text:p>
            </office:annotation>
            <text:p>Utilidad/pérdida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Infraestructura</text:p>
          </table:table-cell>
          <table:table-cell table:style-name="ce7" office:value-type="float" office:value="3500000" calcext:value-type="float">
            <text:p>3500000</text:p>
          </table:table-cell>
          <table:table-cell table:style-name="ce9" office:value-type="float" office:value="20" calcext:value-type="float">
            <text:p><text:s/>20 </text:p>
          </table:table-cell>
          <table:table-cell table:style-name="ce11" table:formula="of:=1/[.D5]" office:value-type="float" office:value="0.05" calcext:value-type="float">
            <text:p><text:s/>0.05 </text:p>
          </table:table-cell>
          <table:table-cell table:style-name="ce7" table:formula="of:=[.C5]*[.E5]" office:value-type="float" office:value="175000" calcext:value-type="float">
            <text:p>175000</text:p>
          </table:table-cell>
          <table:table-cell table:style-name="ce7" table:formula="of:=[.C5]*[.E5]" office:value-type="float" office:value="175000" calcext:value-type="float">
            <text:p>175000</text:p>
          </table:table-cell>
          <table:table-cell table:style-name="ce7" table:formula="of:=[.G5]*8" office:value-type="float" office:value="1400000" calcext:value-type="float">
            <text:p>1400000</text:p>
          </table:table-cell>
          <table:table-cell table:style-name="ce7" table:formula="of:=[.C5]*0.35" office:value-type="float" office:value="1225000" calcext:value-type="float">
            <text:p>1225000</text:p>
          </table:table-cell>
          <table:table-cell table:style-name="ce7" table:formula="of:=[.C5]-[.H5]" office:value-type="float" office:value="2100000" calcext:value-type="float">
            <text:p>2100000</text:p>
          </table:table-cell>
          <table:table-cell table:style-name="ce7" table:formula="of:=[.I5]-[.J5]" office:value-type="float" office:value="-875000" calcext:value-type="float">
            <text:p>-875000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Líneas de prod. Antigua</text:p>
          </table:table-cell>
          <table:table-cell table:style-name="ce7" office:value-type="float" office:value="1600000" calcext:value-type="float">
            <text:p>1600000</text:p>
          </table:table-cell>
          <table:table-cell table:style-name="ce10" office:value-type="float" office:value="10" calcext:value-type="float">
            <text:p><text:s/>10 </text:p>
          </table:table-cell>
          <table:table-cell table:style-name="ce11" table:formula="of:=1/[.D6]" office:value-type="float" office:value="0.1" calcext:value-type="float">
            <text:p><text:s/>0.10 </text:p>
          </table:table-cell>
          <table:table-cell table:style-name="ce7" table:formula="of:=[.C6]*[.E6]" office:value-type="float" office:value="160000" calcext:value-type="float">
            <text:p>160000</text:p>
          </table:table-cell>
          <table:table-cell table:style-name="ce7" table:formula="of:=[.C6]*[.E6]" office:value-type="float" office:value="160000" calcext:value-type="float">
            <text:p>160000</text:p>
          </table:table-cell>
          <table:table-cell table:style-name="ce7" table:formula="of:=[.G6]*8" office:value-type="float" office:value="1280000" calcext:value-type="float">
            <text:p>1280000</text:p>
          </table:table-cell>
          <table:table-cell table:style-name="ce7" table:formula="of:=[.C6]*0.35" office:value-type="float" office:value="560000" calcext:value-type="float">
            <text:p>560000</text:p>
          </table:table-cell>
          <table:table-cell table:style-name="ce7" table:formula="of:=[.C6]-[.H6]" office:value-type="float" office:value="320000" calcext:value-type="float">
            <text:p>320000</text:p>
          </table:table-cell>
          <table:table-cell table:style-name="ce7" table:formula="of:=[.I6]-[.J6]" office:value-type="float" office:value="240000" calcext:value-type="float">
            <text:p>240000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Línea de prod. Nueva</text:p>
          </table:table-cell>
          <table:table-cell table:style-name="ce7" office:value-type="float" office:value="800000" calcext:value-type="float">
            <text:p>800000</text:p>
          </table:table-cell>
          <table:table-cell table:style-name="ce10" office:value-type="float" office:value="10" calcext:value-type="float">
            <text:p><text:s/>10 </text:p>
          </table:table-cell>
          <table:table-cell table:style-name="ce11" table:formula="of:=1/[.D7]" office:value-type="float" office:value="0.1" calcext:value-type="float">
            <text:p><text:s/>0.10 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7]*[.E7]" office:value-type="float" office:value="80000" calcext:value-type="float">
            <text:p>80000</text:p>
          </table:table-cell>
          <table:table-cell table:style-name="ce7" table:formula="of:=[.G7]*2" office:value-type="float" office:value="160000" calcext:value-type="float">
            <text:p>160000</text:p>
          </table:table-cell>
          <table:table-cell table:style-name="ce7" table:formula="of:=[.C7]*0.35" office:value-type="float" office:value="280000" calcext:value-type="float">
            <text:p>280000</text:p>
          </table:table-cell>
          <table:table-cell table:style-name="ce7" table:formula="of:=[.C7]-[.H7]" office:value-type="float" office:value="640000" calcext:value-type="float">
            <text:p>640000</text:p>
          </table:table-cell>
          <table:table-cell table:style-name="ce7" table:formula="of:=[.I7]-[.J7]" office:value-type="float" office:value="-360000" calcext:value-type="float">
            <text:p>-360000</text:p>
          </table:table-cell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7" table:formula="of:=[.C5]+[.C6]" office:value-type="float" office:value="5100000" calcext:value-type="float">
            <text:p>5100000</text:p>
          </table:table-cell>
          <table:table-cell table:style-name="ce7" table:number-columns-repeated="2"/>
          <table:table-cell table:style-name="ce7" table:formula="of:=[.F5]+[.F6]" office:value-type="float" office:value="335000" calcext:value-type="float">
            <text:p>335000</text:p>
          </table:table-cell>
          <table:table-cell table:style-name="ce7" table:formula="of:=[.G5]+[.G6]+[.G7]" office:value-type="float" office:value="415000" calcext:value-type="float">
            <text:p>415000</text:p>
          </table:table-cell>
          <table:table-cell table:style-name="ce14" table:formula="of:=[.H5]+[.H6]+[.H7]" office:value-type="float" office:value="2840000" calcext:value-type="float">
            <office:annotation draw:style-name="gr1" draw:text-style-name="P1" svg:width="3.628cm" svg:height="2.01cm" svg:x="19.305cm" svg:y="2.937cm" draw:caption-point-x="-0.327cm" draw:caption-point-y="0.222cm">
              <dc:creator>Edison Achalma Mendoza</dc:creator>
              <dc:date>2024-07-31T03:29:00</dc:date>
              <text:p>Edison:</text:p>
              <text:p><text:span text:style-name="T1">Luego va sirver VALOR EN LIBROS</text:span></text:p>
              <text:p><text:span text:style-name="T1"/></text:p>
            </office:annotation>
            <text:p>2840000</text:p>
          </table:table-cell>
          <table:table-cell table:style-name="ce7" table:formula="of:=[.I5]+[.I6]+[.I7]" office:value-type="float" office:value="2065000" calcext:value-type="float">
            <text:p>2065000</text:p>
          </table:table-cell>
          <table:table-cell table:style-name="ce7" table:formula="of:=[.J5]+[.J6]+[.J7]" office:value-type="float" office:value="3060000" calcext:value-type="float">
            <text:p>3060000</text:p>
          </table:table-cell>
          <table:table-cell table:style-name="ce14" table:formula="of:=[.K5]+[.K6]+[.K7]" office:value-type="float" office:value="-995000" calcext:value-type="float">
            <office:annotation draw:style-name="gr1" draw:text-style-name="P1" svg:width="3.72cm" svg:height="2.01cm" svg:x="27.953cm" svg:y="2.937cm" draw:caption-point-x="1.263cm" draw:caption-point-y="0.222cm">
              <dc:creator>Edison Achalma Mendoza</dc:creator>
              <dc:date>2024-07-31T03:29:00</dc:date>
              <text:p>Edison:</text:p>
              <text:p><text:span text:style-name="T1">Hay pérdida porque el valor en libros es mayor a el valor comercial</text:span></text:p>
            </office:annotation>
            <text:p>-995000</text:p>
          </table:table-cell>
          <table:table-cell office:value-type="string" calcext:value-type="string">
            <text:p>Perdida</text:p>
          </table:table-cell>
          <table:table-cell office:value-type="string" calcext:value-type="string">
            <text:p>Se presenta un Escudo Fiscal porque hay pérdidas.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calcext:value-type="string">
            <text:p>VALOR DE RECUPERO</text:p>
          </table:table-cell>
          <table:table-cell/>
          <table:table-cell office:value-type="string" calcext:value-type="string">
            <text:p>V en L es mayor al VC</text:p>
          </table:table-cell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table:style-name="ce8"/>
          <table:table-cell table:number-columns-repeated="16381"/>
        </table:table-row>
      </table:table>
      <table:table table:name="Planillas" table:style-name="ta2">
        <table:table-column table:style-name="co1" table:default-cell-style-name="Default"/>
        <table:table-column table:style-name="co11" table:default-cell-style-name="ce16"/>
        <table:table-column table:style-name="co12" table:default-cell-style-name="ce18"/>
        <table:table-column table:style-name="co7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default-cell-style-name="ce20"/>
        <table:table-column table:style-name="co15" table:default-cell-style-name="ce20"/>
        <table:table-column table:style-name="co16" table:default-cell-style-name="ce20"/>
        <table:table-column table:style-name="co1" table:number-columns-repeated="16375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PLANILLA DE REMUNERACIONES EN REGIMEN LABORAL GENERAL</text:p>
          </table:table-cell>
          <table:covered-table-cell table:number-columns-repeated="7" table:style-name="ce6"/>
          <table:table-cell table:number-columns-repeated="16375"/>
        </table:table-row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1">
          <table:table-cell/>
          <table:table-cell table:style-name="ce15" office:value-type="string" calcext:value-type="string">
            <text:p>PUESTO</text:p>
          </table:table-cell>
          <table:table-cell table:style-name="ce15" office:value-type="string" calcext:value-type="string">
            <text:p>MES</text:p>
          </table:table-cell>
          <table:table-cell table:style-name="ce15" office:value-type="string" calcext:value-type="string">
            <text:p>AÑO</text:p>
          </table:table-cell>
          <table:table-cell table:style-name="ce15" office:value-type="string" calcext:value-type="string">
            <text:p>BENEF. SOC.</text:p>
          </table:table-cell>
          <table:table-cell table:style-name="ce15" office:value-type="string" calcext:value-type="string">
            <text:p>CTS</text:p>
          </table:table-cell>
          <table:table-cell table:style-name="ce15" office:value-type="string" calcext:value-type="string">
            <text:p>SUB TOTAL </text:p>
          </table:table-cell>
          <table:table-cell table:style-name="ce15" office:value-type="string" calcext:value-type="string">
            <text:p>ESSALUD</text:p>
          </table:table-cell>
          <table:table-cell table:style-name="ce15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erente general</text:p>
          </table:table-cell>
          <table:table-cell office:value-type="float" office:value="8000" calcext:value-type="float">
            <text:p>8,000</text:p>
          </table:table-cell>
          <table:table-cell table:formula="of:=[.C4]*12" office:value-type="float" office:value="96000" calcext:value-type="float">
            <text:p>96000</text:p>
          </table:table-cell>
          <table:table-cell table:formula="of:=[.C4]*2" office:value-type="float" office:value="16000" calcext:value-type="float">
            <text:p>16000</text:p>
          </table:table-cell>
          <table:table-cell table:formula="of:=[.C4]*1" office:value-type="float" office:value="8000" calcext:value-type="float">
            <text:p>8000</text:p>
          </table:table-cell>
          <table:table-cell table:formula="of:=[.D4]+[.E4]+[.F4]" office:value-type="float" office:value="120000" calcext:value-type="float">
            <text:p>120000</text:p>
          </table:table-cell>
          <table:table-cell table:formula="of:=[.G4]*0.09" office:value-type="float" office:value="10800" calcext:value-type="float">
            <text:p>10800</text:p>
          </table:table-cell>
          <table:table-cell table:formula="of:=[.G4]+[.H4]" office:value-type="float" office:value="130800" calcext:value-type="float">
            <text:p>1308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erente de marketing</text:p>
          </table:table-cell>
          <table:table-cell office:value-type="float" office:value="5800" calcext:value-type="float">
            <text:p>5,800</text:p>
          </table:table-cell>
          <table:table-cell table:formula="of:=[.C5]*12" office:value-type="float" office:value="69600" calcext:value-type="float">
            <text:p>69600</text:p>
          </table:table-cell>
          <table:table-cell table:formula="of:=[.C5]*2" office:value-type="float" office:value="11600" calcext:value-type="float">
            <text:p>11600</text:p>
          </table:table-cell>
          <table:table-cell table:formula="of:=[.C5]*1" office:value-type="float" office:value="5800" calcext:value-type="float">
            <text:p>5800</text:p>
          </table:table-cell>
          <table:table-cell table:formula="of:=[.D5]+[.E5]+[.F5]" office:value-type="float" office:value="87000" calcext:value-type="float">
            <text:p>87000</text:p>
          </table:table-cell>
          <table:table-cell table:formula="of:=[.G5]*0.09" office:value-type="float" office:value="7830" calcext:value-type="float">
            <text:p>7830</text:p>
          </table:table-cell>
          <table:table-cell table:formula="of:=[.G5]+[.H5]" office:value-type="float" office:value="94830" calcext:value-type="float">
            <text:p>9483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erente de Adm. y Finanzas</text:p>
          </table:table-cell>
          <table:table-cell office:value-type="float" office:value="6000" calcext:value-type="float">
            <text:p>6,000</text:p>
          </table:table-cell>
          <table:table-cell table:formula="of:=[.C6]*12" office:value-type="float" office:value="72000" calcext:value-type="float">
            <text:p>72000</text:p>
          </table:table-cell>
          <table:table-cell table:formula="of:=[.C6]*2" office:value-type="float" office:value="12000" calcext:value-type="float">
            <text:p>12000</text:p>
          </table:table-cell>
          <table:table-cell table:formula="of:=[.C6]*1" office:value-type="float" office:value="6000" calcext:value-type="float">
            <text:p>6000</text:p>
          </table:table-cell>
          <table:table-cell table:formula="of:=[.D6]+[.E6]+[.F6]" office:value-type="float" office:value="90000" calcext:value-type="float">
            <text:p>90000</text:p>
          </table:table-cell>
          <table:table-cell table:formula="of:=[.G6]*0.09" office:value-type="float" office:value="8100" calcext:value-type="float">
            <text:p>8100</text:p>
          </table:table-cell>
          <table:table-cell table:formula="of:=[.G6]+[.H6]" office:value-type="float" office:value="98100" calcext:value-type="float">
            <text:p>981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erente de producción</text:p>
          </table:table-cell>
          <table:table-cell office:value-type="float" office:value="5500" calcext:value-type="float">
            <text:p>5,500</text:p>
          </table:table-cell>
          <table:table-cell table:formula="of:=[.C7]*12" office:value-type="float" office:value="66000" calcext:value-type="float">
            <text:p>66000</text:p>
          </table:table-cell>
          <table:table-cell table:formula="of:=[.C7]*2" office:value-type="float" office:value="11000" calcext:value-type="float">
            <text:p>11000</text:p>
          </table:table-cell>
          <table:table-cell table:formula="of:=[.C7]*1" office:value-type="float" office:value="5500" calcext:value-type="float">
            <text:p>5500</text:p>
          </table:table-cell>
          <table:table-cell table:formula="of:=[.D7]+[.E7]+[.F7]" office:value-type="float" office:value="82500" calcext:value-type="float">
            <text:p>82500</text:p>
          </table:table-cell>
          <table:table-cell table:formula="of:=[.G7]*0.09" office:value-type="float" office:value="7425" calcext:value-type="float">
            <text:p>7425</text:p>
          </table:table-cell>
          <table:table-cell table:formula="of:=[.G7]+[.H7]" office:value-type="float" office:value="89925" calcext:value-type="float">
            <text:p>89925</text:p>
          </table:table-cell>
          <table:table-cell table:number-columns-repeated="16375"/>
        </table:table-row>
        <table:table-row table:style-name="ro1">
          <table:table-cell/>
          <table:table-cell table:style-name="ce17" office:value-type="string" calcext:value-type="string">
            <text:p>TOTAL</text:p>
          </table:table-cell>
          <table:table-cell table:style-name="ce19" table:formula="of:=SUM([.C4:.C7])" office:value-type="float" office:value="25300" calcext:value-type="float">
            <text:p>25,300</text:p>
          </table:table-cell>
          <table:table-cell table:style-name="ce19" table:formula="of:=SUM([.D4:.D7])" office:value-type="float" office:value="303600" calcext:value-type="float">
            <text:p>303,600</text:p>
          </table:table-cell>
          <table:table-cell table:style-name="ce19" table:formula="of:=SUM([.E4:.E7])" office:value-type="float" office:value="50600" calcext:value-type="float">
            <text:p>50,600</text:p>
          </table:table-cell>
          <table:table-cell table:style-name="ce19" table:formula="of:=SUM([.F4:.F7])" office:value-type="float" office:value="25300" calcext:value-type="float">
            <text:p>25,300</text:p>
          </table:table-cell>
          <table:table-cell table:style-name="ce19" table:formula="of:=SUM([.G4:.G7])" office:value-type="float" office:value="379500" calcext:value-type="float">
            <text:p>379,500</text:p>
          </table:table-cell>
          <table:table-cell table:style-name="ce19" table:formula="of:=SUM([.H4:.H7])" office:value-type="float" office:value="34155" calcext:value-type="float">
            <text:p>34,155</text:p>
          </table:table-cell>
          <table:table-cell table:style-name="ce19" table:formula="of:=SUM([.I4:.I7])" office:value-type="float" office:value="413655" calcext:value-type="float">
            <text:p>413,655</text:p>
          </table:table-cell>
          <table:table-cell table:number-columns-repeated="16375"/>
        </table:table-row>
      </table:table>
      <table:table table:name="FC Economico" table:style-name="ta3"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number-columns-repeated="2" table:default-cell-style-name="Default"/>
        <table:table-column table:style-name="co1" table:default-cell-style-name="ce120"/>
        <table:table-column table:style-name="co24" table:default-cell-style-name="Default"/>
        <table:table-column table:style-name="co19" table:default-cell-style-name="Default"/>
        <table:table-column table:style-name="co25" table:number-columns-repeated="2" table:default-cell-style-name="Default"/>
        <table:table-column table:style-name="co22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" table:number-columns-repeated="16362" table:default-cell-style-name="Default"/>
        <table:table-row table:style-name="ro1">
          <table:table-cell table:style-name="ce21"/>
          <table:table-cell table:style-name="ce21" office:value-type="string" calcext:value-type="string">
            <text:p>EJERCICIO: Flujo de Caja Económico</text:p>
          </table:table-cell>
          <table:table-cell table:style-name="ce21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n importante grupo de inversionistas desea determinar la rentablidad de instalarse en el país co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 afamada marca de bebidas Dr. Trago en sus dos versiones: Azul y Roja. Para establecer la acep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ación del producto, se efectúo un estudio de mercado a través del mercado de prueba. Los resulta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os fueron los siguientes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urante el primer año de operación, las ventas, por concepto de conocimiento del producto, alcan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zarán a 350,000 litros; sin embargo, en una etapa posterior, más bien conocida como adopción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entre el segundo y cuarto año), se determinó que se podrían vender 280,000 litros, del quinto al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xto trienta por ciento más y los dos últimos 23% más que el periodo anterior. Por otra parte, se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definió como estrategia <text:s/>vender la bebida a S/. 40 el litro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l estudio técnico del proyecto determinó que cada línea de producción era capaz de elaborar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200,000 litros anuales, por lo que, cuando la demanda se incremente por sobre su capacidad, s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eberá instalar una adicional. Para producir un litro de bebida se requería incurrir en los siguient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stos: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21" office:value-type="string" calcext:value-type="string">
            <text:p>Insumos</text:p>
          </table:table-cell>
          <table:table-cell table:style-name="ce21"/>
          <table:table-cell table:style-name="ce21" office:value-type="string" calcext:value-type="string">
            <text:p>Costo Unitari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Azúcar</text:p>
          </table:table-cell>
          <table:table-cell/>
          <table:table-cell office:value-type="float" office:value="1.86" calcext:value-type="float">
            <text:p>1.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Agua</text:p>
          </table:table-cell>
          <table:table-cell/>
          <table:table-cell office:value-type="float" office:value="1.24" calcext:value-type="float">
            <text:p>1.24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2" office:value-type="string" calcext:value-type="string">
            <text:p>Alimentos químicos</text:p>
          </table:table-cell>
          <table:table-cell/>
          <table:table-cell office:value-type="float" office:value="3.58" calcext:value-type="float">
            <text:p>3.5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olorantes</text:p>
          </table:table-cell>
          <table:table-cell/>
          <table:table-cell office:value-type="float" office:value="2.55" calcext:value-type="float">
            <text:p>2.5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Energía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Mano de obra directa</text:p>
          </table:table-cell>
          <table:table-cell/>
          <table:table-cell office:value-type="float" office:value="11.56" calcext:value-type="float">
            <text:p>11.56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Para operar con la marca Dr. Trago será necesario pagar un Royalty anual equivalente a 5% de la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entas netas para los tres primeros años y a 3% por los restantes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 estudio organizacional determinó que para el correcto desarrollo y administración de la empres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 encuentra en el régimen laboral y tributario general y será necesario contar con una estructura propuesta por: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1" office:value-type="string" calcext:value-type="string">
            <text:p>Puesto</text:p>
          </table:table-cell>
          <table:table-cell/>
          <table:table-cell table:style-name="ce21" office:value-type="string" calcext:value-type="string">
            <text:p>Remuneración Brut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Gerente general</text:p>
          </table:table-cell>
          <table:table-cell/>
          <table:table-cell table:style-name="ce84" office:value-type="float" office:value="8000" calcext:value-type="float">
            <text:p>8,000</text:p>
          </table:table-cell>
          <table:table-cell office:value-type="string" calcext:value-type="string">
            <text:p>mensual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Gerente de marketing</text:p>
          </table:table-cell>
          <table:table-cell/>
          <table:table-cell table:style-name="ce84" office:value-type="float" office:value="5800" calcext:value-type="float">
            <text:p>5,800</text:p>
          </table:table-cell>
          <table:table-cell office:value-type="string" calcext:value-type="string">
            <text:p>mensual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Gerente de Adm. y Finanzas</text:p>
          </table:table-cell>
          <table:table-cell/>
          <table:table-cell table:style-name="ce84" office:value-type="float" office:value="6000" calcext:value-type="float">
            <text:p>6,000</text:p>
          </table:table-cell>
          <table:table-cell office:value-type="string" calcext:value-type="string">
            <text:p>mensual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Gerente de producción</text:p>
          </table:table-cell>
          <table:table-cell/>
          <table:table-cell table:style-name="ce84" office:value-type="float" office:value="5500" calcext:value-type="float">
            <text:p>5,500</text:p>
          </table:table-cell>
          <table:table-cell office:value-type="string" calcext:value-type="string">
            <text:p>mensual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Adicionalmente, se han estimado gastos totales por concepto de administración por S/. 300,00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ensuales, cifra que se mantendrá constante en términos reales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l estudio financiero determinó que desde el momento en que la empresa empiece a producir hast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 primera venta trasncurrirá un periodo de tres meses, el cual deberá ser considerado como capita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e trabajo sólo en lo que a costos variables se refiere, sin considerar Royalties.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Para la ejecución del proyecto se requerirá invertir S/.3´500,000 en infraestructura, la que será de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reciada linealmente en 20 años. Se estima que al final del octavo año de operación se podrá ven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er a 35% de su valor de adquisición. Para montar la fabrica se requerirá la compra de un terreno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evaluado en 500,0000, valor que se mantendrá en el tiempo. Para la producción propiamente tal, se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instalarán en un comienzo dos líneas de producción, cuya tecnología requiere una inversión de S/. 800,000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cada una y serán depreciadas linealmente a 10 años. Al final del año ocho, toda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s líneas de producción tendrán un valor comercial o de salvamento equivalente a 35% de su valor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e adquisición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Los inversionistas lo han elegido a usted para que los asesore en su decisión, para lo cual debe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considerar que la tasa de impuestos a las utilidades es de 29.5% y el IGV igual a 18%.</text:p>
          </table:table-cell>
          <table:table-cell table:number-columns-repeated="16382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>
            <text:p>SOLUC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Inversión Inicial del Proyect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1" office:value-type="string" calcext:value-type="string">
            <text:p>Activos</text:p>
          </table:table-cell>
          <table:table-cell table:style-name="ce72"/>
          <table:table-cell table:style-name="ce85" office:value-type="string" calcext:value-type="string">
            <text:p>Valor de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52"/>
          <table:table-cell table:style-name="ce73"/>
          <table:table-cell table:style-name="ce86" office:value-type="string" calcext:value-type="string">
            <text:p>Compra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2" table:number-rows-spanned="1">
            <text:p>Infraestrucura</text:p>
          </table:table-cell>
          <table:covered-table-cell table:style-name="ce74"/>
          <table:table-cell table:style-name="ce87" office:value-type="float" office:value="3500000" calcext:value-type="float">
            <text:p>3,500,0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54" office:value-type="string" calcext:value-type="string">
            <text:p>Dos líneas de producción</text:p>
          </table:table-cell>
          <table:table-cell table:style-name="ce16"/>
          <table:table-cell table:style-name="ce88" office:value-type="float" office:value="1600000" calcext:value-type="float">
            <text:p><text:s/>1,600,000 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55" office:value-type="string" calcext:value-type="string" table:number-columns-spanned="2" table:number-rows-spanned="1">
            <text:p>Terreno</text:p>
          </table:table-cell>
          <table:covered-table-cell table:style-name="ce75"/>
          <table:table-cell table:style-name="ce88" office:value-type="float" office:value="500000" calcext:value-type="float">
            <text:p><text:s/>500,000 </text:p>
          </table:table-cell>
          <table:table-cell table:style-name="ce108" table:formula="of:=[.E58]+[.E59]+[.E60]" office:value-type="float" office:value="5600000" calcext:value-type="float">
            <office:annotation draw:style-name="gr3" draw:text-style-name="P1" svg:width="3.63cm" svg:height="1.983cm" svg:x="18.667cm" svg:y="26.379cm" draw:caption-point-x="1.795cm" draw:caption-point-y="0.169cm">
              <dc:creator>Edison Achalma Mendoza</dc:creator>
              <dc:date>2024-07-31T03:29:00</dc:date>
              <text:p>Edison:</text:p>
              <text:p><text:span text:style-name="T1">Compras</text:span></text:p>
              <text:p><text:span text:style-name="T1"/></text:p>
            </office:annotation>
            <text:p><text:s/>5,600,000 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4" office:value-type="string" calcext:value-type="string">
            <text:p>Capital de trabajo</text:p>
          </table:table-cell>
          <table:table-cell table:style-name="ce16"/>
          <table:table-cell table:style-name="ce89" table:formula="of:=[.E73]" office:value-type="float" office:value="1976625" calcext:value-type="float">
            <text:p><text:s/>1,976,625 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2" table:number-rows-spanned="1">
            <text:p>Inversión Inicial</text:p>
          </table:table-cell>
          <table:covered-table-cell table:style-name="ce76"/>
          <table:table-cell table:style-name="ce90" table:formula="of:=SUM([.E58:.E61])" office:value-type="float" office:value="7576625" calcext:value-type="float">
            <text:p>7,576,62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Adicionalmente se sabe que el final de periodo 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e invertirá en una nueva línea de produccón d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200,000 litros para abastecer la demanda de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año 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Para hallar el capital de trabajo se procede así: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office:annotation draw:style-name="gr4" draw:text-style-name="P1" svg:width="3.573cm" svg:height="2.016cm" svg:x="10.435cm" svg:y="30.427cm" draw:caption-point-x="1.553cm" draw:caption-point-y="0.169cm">
              <dc:creator>Edison Achalma Mendoza</dc:creator>
              <dc:date>2024-07-31T03:29:00</dc:date>
              <text:p>Edison:</text:p>
              <text:p><text:span text:style-name="T1">Es un CVU que se mantiene fijo, durante el horizonte de evaluación.</text:span></text:p>
            </office:annotation>
            <text:p>Costo / litro</text:p>
          </table:table-cell>
          <table:table-cell/>
          <table:table-cell table:style-name="ce91" table:formula="of:=SUM([.E17:.E22])" office:value-type="float" office:value="22.59" calcext:value-type="float">
            <text:p>22.59</text:p>
          </table:table-cell>
          <table:table-cell office:value-type="string" calcext:value-type="string">
            <text:p>CVU que se mantiene fijo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roducción primer año</text:p>
          </table:table-cell>
          <table:table-cell/>
          <table:table-cell table:style-name="ce92" office:value-type="float" office:value="350000" calcext:value-type="float">
            <text:p>350,000</text:p>
          </table:table-cell>
          <table:table-cell office:value-type="string" calcext:value-type="string">
            <text:p>litro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osto de producción primer año</text:p>
          </table:table-cell>
          <table:table-cell/>
          <table:table-cell table:style-name="ce93" table:formula="of:=[.E70]*[.E69]" office:value-type="float" office:value="7906500" calcext:value-type="float">
            <text:p><text:s/>7,906,500 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osto de operación mensual</text:p>
          </table:table-cell>
          <table:table-cell/>
          <table:table-cell table:style-name="ce94" table:formula="of:=[.E71]/12" office:value-type="float" office:value="658875" calcext:value-type="float">
            <text:p><text:s/>658,875 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1" office:value-type="string" calcext:value-type="string">
            <text:p>Capital de trabajo inicial</text:p>
          </table:table-cell>
          <table:table-cell table:style-name="ce21"/>
          <table:table-cell table:style-name="ce95" table:formula="of:=[.E72]*3" office:value-type="float" office:value="1976625" calcext:value-type="float">
            <text:p><text:s/>1,976,625 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l capital de trabajo varia de acuerdo con los cambios de producción, en el segundo año se requier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n menor capital de trabajo, por lo que se deberá retirar el capital de trabajo. El cuadro siguiente 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muestra los cambios en el capital de trabajo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5" office:value-type="string" calcext:value-type="string">
            <text:p>Momento</text:p>
          </table:table-cell>
          <table:table-cell table:style-name="ce57" office:value-type="string" calcext:value-type="string">
            <text:p>Inversión en ca-</text:p>
          </table:table-cell>
          <table:table-cell table:style-name="ce77" office:value-type="string" calcext:value-type="string">
            <text:p>Capital en </text:p>
          </table:table-cell>
          <table:table-cell table:style-name="ce96" office:value-type="string" calcext:value-type="string">
            <text:p>Cambio en la</text:p>
          </table:table-cell>
          <table:table-cell table:number-columns-repeated="16379"/>
        </table:table-row>
        <table:table-row table:style-name="ro1">
          <table:table-cell/>
          <table:table-cell table:style-name="ce36"/>
          <table:table-cell table:style-name="ce58" office:value-type="string" calcext:value-type="string">
            <text:p>pital de trabajo</text:p>
          </table:table-cell>
          <table:table-cell table:style-name="ce78" office:value-type="string" calcext:value-type="string">
            <text:p>operación</text:p>
          </table:table-cell>
          <table:table-cell table:style-name="ce97" office:value-type="string" calcext:value-type="string">
            <text:p>demanda</text:p>
          </table:table-cell>
          <table:table-cell table:number-columns-repeated="16379"/>
        </table:table-row>
        <table:table-row table:style-name="ro1">
          <table:table-cell/>
          <table:table-cell table:style-name="ce37" office:value-type="string" calcext:value-type="string">
            <text:p>Año 0</text:p>
          </table:table-cell>
          <table:table-cell table:style-name="ce59" table:formula="of:=[.E73]*(-1)" office:value-type="float" office:value="-1976625" calcext:value-type="float">
            <text:p><text:s/>(1,976,625)</text:p>
          </table:table-cell>
          <table:table-cell table:style-name="ce79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8" office:value-type="string" calcext:value-type="string">
            <text:p>Año 1</text:p>
          </table:table-cell>
          <table:table-cell table:style-name="ce60" table:formula="of:=[.D83]-[.D82]" office:value-type="float" office:value="395325" calcext:value-type="float">
            <office:annotation draw:style-name="gr4" draw:text-style-name="P1" svg:width="3.573cm" svg:height="2.016cm" svg:x="10.435cm" svg:y="36.275cm" draw:caption-point-x="1.553cm" draw:caption-point-y="0.168cm">
              <dc:creator>Edison Achalma Mendoza</dc:creator>
              <dc:date>2024-07-31T03:29:00</dc:date>
              <text:p>Edison:</text:p>
              <text:p><text:span text:style-name="T1">Capital de trabajo recuperado debido a la reducion de la produccion en 20%</text:span></text:p>
            </office:annotation>
            <text:p><text:s/>395,325 </text:p>
          </table:table-cell>
          <table:table-cell table:style-name="ce60" table:formula="of:=[.C81]" office:value-type="float" office:value="-1976625" calcext:value-type="float">
            <text:p><text:s/>(1,976,625)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8" office:value-type="string" calcext:value-type="string">
            <text:p>Año 2</text:p>
          </table:table-cell>
          <table:table-cell table:style-name="ce60" table:formula="of:=[.D84]-[.D83]" office:value-type="float" office:value="0" calcext:value-type="float">
            <text:p><text:s/>- <text:s text:c="2"/></text:p>
          </table:table-cell>
          <table:table-cell table:style-name="ce60" table:formula="of:=[.D82]*(1+[.E83])" office:value-type="float" office:value="-1581300" calcext:value-type="float">
            <office:annotation draw:style-name="gr5" draw:text-style-name="P1" svg:width="3.679cm" svg:height="1.957cm" svg:x="13.612cm" svg:y="36.724cm" draw:caption-point-x="1.844cm" draw:caption-point-y="0.169cm">
              <dc:creator>Edison Achalma Mendoza</dc:creator>
              <dc:date>2024-07-31T03:29:00</dc:date>
              <text:p>Edison:</text:p>
              <text:p><text:span text:style-name="T1">Se redujo con tasa de cambio de la produccion</text:span></text:p>
            </office:annotation>
            <text:p><text:s/>(1,581,300)</text:p>
          </table:table-cell>
          <table:table-cell table:style-name="ce100" office:value-type="percentage" office:value="-0.2" calcext:value-type="percentage">
            <text:p>-20 %</text:p>
          </table:table-cell>
          <table:table-cell table:number-columns-repeated="16379"/>
        </table:table-row>
        <table:table-row table:style-name="ro1">
          <table:table-cell/>
          <table:table-cell table:style-name="ce38" office:value-type="string" calcext:value-type="string">
            <text:p>Año 3</text:p>
          </table:table-cell>
          <table:table-cell table:style-name="ce60" table:formula="of:=[.D85]-[.D84]" office:value-type="float" office:value="0" calcext:value-type="float">
            <text:p><text:s/>- <text:s text:c="2"/></text:p>
          </table:table-cell>
          <table:table-cell table:style-name="ce60" table:formula="of:=[.D83]" office:value-type="float" office:value="-1581300" calcext:value-type="float">
            <text:p><text:s/>(1,581,300)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8" office:value-type="string" calcext:value-type="string">
            <text:p>Año 4</text:p>
          </table:table-cell>
          <table:table-cell table:style-name="ce60" table:formula="of:=[.D86]-[.D85]" office:value-type="float" office:value="-474390" calcext:value-type="float">
            <text:p><text:s/>(474,390)</text:p>
          </table:table-cell>
          <table:table-cell table:style-name="ce60" table:formula="of:=[.D84]" office:value-type="float" office:value="-1581300" calcext:value-type="float">
            <text:p><text:s/>(1,581,300)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8" office:value-type="string" calcext:value-type="string">
            <text:p>Año 5</text:p>
          </table:table-cell>
          <table:table-cell table:style-name="ce60" table:formula="of:=[.D87]-[.D86]" office:value-type="float" office:value="0" calcext:value-type="float">
            <text:p><text:s/>- <text:s text:c="2"/></text:p>
          </table:table-cell>
          <table:table-cell table:style-name="ce60" table:formula="of:=[.D85]*(1+[.E86])" office:value-type="float" office:value="-2055690" calcext:value-type="float">
            <text:p><text:s/>(2,055,690)</text:p>
          </table:table-cell>
          <table:table-cell table:style-name="ce100" office:value-type="percentage" office:value="0.3" calcext:value-type="percentage">
            <text:p>30 %</text:p>
          </table:table-cell>
          <table:table-cell table:number-columns-repeated="16379"/>
        </table:table-row>
        <table:table-row table:style-name="ro1">
          <table:table-cell/>
          <table:table-cell table:style-name="ce38" office:value-type="string" calcext:value-type="string">
            <text:p>Año 6</text:p>
          </table:table-cell>
          <table:table-cell table:style-name="ce60" table:formula="of:=[.D88]-[.D87]" office:value-type="float" office:value="-472808.7" calcext:value-type="float">
            <text:p><text:s/>(472,809)</text:p>
          </table:table-cell>
          <table:table-cell table:style-name="ce60" table:formula="of:=[.D86]" office:value-type="float" office:value="-2055690" calcext:value-type="float">
            <text:p><text:s/>(2,055,690)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8" office:value-type="string" calcext:value-type="string">
            <text:p>Año 7</text:p>
          </table:table-cell>
          <table:table-cell table:style-name="ce60" table:formula="of:=[.D89]-[.D88]" office:value-type="float" office:value="0" calcext:value-type="float">
            <text:p><text:s/>- <text:s text:c="2"/></text:p>
          </table:table-cell>
          <table:table-cell table:style-name="ce80" table:formula="of:=[.D87]*(1+[.E88])" office:value-type="float" office:value="-2528498.7" calcext:value-type="float">
            <text:p><text:s/>(2,528,499)</text:p>
          </table:table-cell>
          <table:table-cell table:style-name="ce100" office:value-type="percentage" office:value="0.23" calcext:value-type="percentage">
            <text:p>23 %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string" calcext:value-type="string">
            <text:p>Año 8</text:p>
          </table:table-cell>
          <table:table-cell table:style-name="ce61" office:value-type="float" office:value="0" calcext:value-type="float">
            <text:p><text:s/>- <text:s text:c="2"/></text:p>
          </table:table-cell>
          <table:table-cell table:style-name="ce61" table:formula="of:=[.D88]" office:value-type="float" office:value="-2528498.7" calcext:value-type="float">
            <text:p><text:s/>(2,528,499)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da línea de producción tiene una capacidad máxima de 200,000 litros cada una, al sexto año de opera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ión deberá adquirirse una adicional, ya que la producción esperada para el año séptimno supera la capa-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idad máxima de las dos iniciales, las que no pueden exceder los 400,000 litros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0" office:value-type="string" calcext:value-type="string" table:number-columns-spanned="4" table:number-rows-spanned="1">
            <text:p>Requerimientos de producción en función de la demanda estimada</text:p>
          </table:table-cell>
          <table:covered-table-cell table:number-columns-repeated="3" table:style-name="ce6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1" office:value-type="string" calcext:value-type="string">
            <text:p>Momento</text:p>
          </table:table-cell>
          <table:table-cell table:style-name="ce63" office:value-type="string" calcext:value-type="string">
            <text:p>Cambios en la</text:p>
          </table:table-cell>
          <table:table-cell table:style-name="ce81" office:value-type="string" calcext:value-type="string">
            <text:p>Cambio marginal</text:p>
          </table:table-cell>
          <table:table-cell table:style-name="ce102" office:value-type="string" calcext:value-type="string">
            <text:p>Produccion 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64" office:value-type="string" calcext:value-type="string">
            <text:p>demanda</text:p>
          </table:table-cell>
          <table:table-cell table:style-name="ce82" office:value-type="string" calcext:value-type="string">
            <text:p>en litros</text:p>
          </table:table-cell>
          <table:table-cell table:style-name="ce103" office:value-type="string" calcext:value-type="string">
            <text:p>estimada </text:p>
          </table:table-cell>
          <table:table-cell table:style-name="ce109" office:value-type="string" calcext:value-type="string">
            <text:p>Lineas</text:p>
          </table:table-cell>
          <table:table-cell table:number-columns-repeated="16378"/>
        </table:table-row>
        <table:table-row table:style-name="ro1">
          <table:table-cell/>
          <table:table-cell table:style-name="ce38" office:value-type="string" calcext:value-type="string">
            <text:p>Año 1</text:p>
          </table:table-cell>
          <table:table-cell table:style-name="ce60"/>
          <table:table-cell table:style-name="ce60" office:value-type="float" office:value="0" calcext:value-type="float">
            <text:p><text:s/>- <text:s text:c="2"/></text:p>
          </table:table-cell>
          <table:table-cell table:style-name="ce104" office:value-type="float" office:value="350000" calcext:value-type="float">
            <text:p>350,000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/>
          <table:table-cell table:style-name="ce38" office:value-type="string" calcext:value-type="string">
            <text:p>Año 2</text:p>
          </table:table-cell>
          <table:table-cell table:style-name="ce65" table:formula="of:=[.E83]" office:value-type="percentage" office:value="-0.2" calcext:value-type="percentage">
            <text:p>-20 %</text:p>
          </table:table-cell>
          <table:table-cell table:style-name="ce60" table:formula="of:=[.E100]-[.E99]" office:value-type="float" office:value="-70000" calcext:value-type="float">
            <text:p><text:s/>(70,000)</text:p>
          </table:table-cell>
          <table:table-cell table:style-name="ce105" table:formula="of:=[.E99]*(1+[.C100])" office:value-type="float" office:value="280000" calcext:value-type="float">
            <text:p><text:s/>280,000 </text:p>
          </table:table-cell>
          <table:table-cell table:style-name="ce111" office:value-type="float" office:value="2" calcext:value-type="float">
            <text:p>2</text:p>
          </table:table-cell>
          <table:table-cell/>
          <table:table-cell table:style-name="ce112" table:formula="of:=([.E100]-[.E99])/[.E99]" office:value-type="percentage" office:value="-0.2" calcext:value-type="percentage">
            <text:p>-20 %</text:p>
          </table:table-cell>
          <table:table-cell table:number-columns-repeated="16376"/>
        </table:table-row>
        <table:table-row table:style-name="ro1">
          <table:table-cell/>
          <table:table-cell table:style-name="ce38" office:value-type="string" calcext:value-type="string">
            <text:p>Año 3</text:p>
          </table:table-cell>
          <table:table-cell table:style-name="ce16"/>
          <table:table-cell table:style-name="ce60" office:value-type="float" office:value="0" calcext:value-type="float">
            <text:p><text:s/>- <text:s text:c="2"/></text:p>
          </table:table-cell>
          <table:table-cell table:style-name="ce106" table:formula="of:=[.E100]" office:value-type="float" office:value="280000" calcext:value-type="float">
            <text:p><text:s/>280,000 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/>
          <table:table-cell table:style-name="ce38" office:value-type="string" calcext:value-type="string">
            <text:p>Año 4</text:p>
          </table:table-cell>
          <table:table-cell table:style-name="ce60"/>
          <table:table-cell table:style-name="ce60" office:value-type="float" office:value="0" calcext:value-type="float">
            <text:p><text:s/>- <text:s text:c="2"/></text:p>
          </table:table-cell>
          <table:table-cell table:style-name="ce106" table:formula="of:=[.E101]" office:value-type="float" office:value="280000" calcext:value-type="float">
            <text:p><text:s/>280,000 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/>
          <table:table-cell table:style-name="ce38" office:value-type="string" calcext:value-type="string">
            <text:p>Año 5</text:p>
          </table:table-cell>
          <table:table-cell table:style-name="ce65" table:formula="of:=[.E86]" office:value-type="percentage" office:value="0.3" calcext:value-type="percentage">
            <text:p>30 %</text:p>
          </table:table-cell>
          <table:table-cell table:style-name="ce60" table:formula="of:=[.E103]-[.E102]" office:value-type="float" office:value="84000" calcext:value-type="float">
            <text:p><text:s/>84,000 </text:p>
          </table:table-cell>
          <table:table-cell table:style-name="ce106" table:formula="of:=[.E102]*(1+[.C103])" office:value-type="float" office:value="364000" calcext:value-type="float">
            <text:p><text:s/>364,000 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/>
          <table:table-cell table:style-name="ce38" office:value-type="string" calcext:value-type="string">
            <text:p>Año 6</text:p>
          </table:table-cell>
          <table:table-cell table:style-name="ce60"/>
          <table:table-cell table:style-name="ce60" office:value-type="float" office:value="0" calcext:value-type="float">
            <text:p><text:s/>- <text:s text:c="2"/></text:p>
          </table:table-cell>
          <table:table-cell table:style-name="ce106" table:formula="of:=[.E103]" office:value-type="float" office:value="364000" calcext:value-type="float">
            <text:p><text:s/>364,000 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/>
          <table:table-cell table:style-name="ce38" office:value-type="string" calcext:value-type="string">
            <text:p>Año 7</text:p>
          </table:table-cell>
          <table:table-cell table:style-name="ce65" table:formula="of:=[.E88]" office:value-type="percentage" office:value="0.23" calcext:value-type="percentage">
            <text:p>23 %</text:p>
          </table:table-cell>
          <table:table-cell table:style-name="ce80" table:formula="of:=[.E105]-[.E104]" office:value-type="float" office:value="83720" calcext:value-type="float">
            <text:p><text:s/>83,720 </text:p>
          </table:table-cell>
          <table:table-cell table:style-name="ce106" table:formula="of:=[.E104]*(1+[.C105])" office:value-type="float" office:value="447720" calcext:value-type="float">
            <text:p><text:s/>447,720 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/>
          <table:table-cell table:style-name="ce39" office:value-type="string" calcext:value-type="string">
            <text:p>Año 8</text:p>
          </table:table-cell>
          <table:table-cell table:number-columns-repeated="2" table:style-name="ce61" office:value-type="float" office:value="0" calcext:value-type="float">
            <text:p><text:s/>- <text:s text:c="2"/></text:p>
          </table:table-cell>
          <table:table-cell table:style-name="ce107" table:formula="of:=[.E105]" office:value-type="float" office:value="447720" calcext:value-type="float">
            <text:p><text:s/>447,720 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2" office:value-type="string" calcext:value-type="string" table:number-columns-spanned="11" table:number-rows-spanned="1">
            <text:p>FLUJO DE CAJA ECONÓMICO <text:s/>FORMATO B</text:p>
          </table:table-cell>
          <table:covered-table-cell table:number-columns-repeated="10" table:style-name="ce22"/>
          <table:table-cell/>
          <table:table-cell table:style-name="ce22" office:value-type="string" calcext:value-type="string" table:number-columns-spanned="10" table:number-rows-spanned="1">
            <text:p>FLUJO DE CAJA ECONÓMICO <text:s/>FORMATO A</text:p>
          </table:table-cell>
          <table:covered-table-cell table:number-columns-repeated="9" table:style-name="ce22"/>
          <table:table-cell table:number-columns-repeated="16362"/>
        </table:table-row>
        <table:table-row table:style-name="ro1">
          <table:table-cell table:style-name="ce23" office:value-type="string" calcext:value-type="string">
            <text:p>RUBRO</text:p>
          </table:table-cell>
          <table:table-cell table:style-name="ce43"/>
          <table:table-cell table:style-name="ce43" office:value-type="string" calcext:value-type="string">
            <text:p>Año 0</text:p>
          </table:table-cell>
          <table:table-cell table:style-name="ce43" office:value-type="string" calcext:value-type="string">
            <text:p>Año 1</text:p>
          </table:table-cell>
          <table:table-cell table:style-name="ce43" office:value-type="string" calcext:value-type="string">
            <text:p>Año 2</text:p>
          </table:table-cell>
          <table:table-cell table:style-name="ce43" office:value-type="string" calcext:value-type="string">
            <text:p>Año 3</text:p>
          </table:table-cell>
          <table:table-cell table:style-name="ce43" office:value-type="string" calcext:value-type="string">
            <text:p>Año 4</text:p>
          </table:table-cell>
          <table:table-cell table:style-name="ce43" office:value-type="string" calcext:value-type="string">
            <text:p>Año 5</text:p>
          </table:table-cell>
          <table:table-cell table:style-name="ce43" office:value-type="string" calcext:value-type="string">
            <text:p>Año 6</text:p>
          </table:table-cell>
          <table:table-cell table:style-name="ce43" office:value-type="string" calcext:value-type="string">
            <text:p>Año 7</text:p>
          </table:table-cell>
          <table:table-cell table:style-name="ce113" office:value-type="string" calcext:value-type="string">
            <text:p>Año 8</text:p>
          </table:table-cell>
          <table:table-cell/>
          <table:table-cell table:style-name="ce121" office:value-type="string" calcext:value-type="string">
            <text:p>RUBRO</text:p>
          </table:table-cell>
          <table:table-cell table:style-name="ce121" office:value-type="string" calcext:value-type="string">
            <text:p>Año 0</text:p>
          </table:table-cell>
          <table:table-cell table:style-name="ce121" office:value-type="string" calcext:value-type="string">
            <text:p>Año 1</text:p>
          </table:table-cell>
          <table:table-cell table:style-name="ce121" office:value-type="string" calcext:value-type="string">
            <text:p>Año 2</text:p>
          </table:table-cell>
          <table:table-cell table:style-name="ce121" office:value-type="string" calcext:value-type="string">
            <text:p>Año 3</text:p>
          </table:table-cell>
          <table:table-cell table:style-name="ce121" office:value-type="string" calcext:value-type="string">
            <text:p>Año 4</text:p>
          </table:table-cell>
          <table:table-cell table:style-name="ce121" office:value-type="string" calcext:value-type="string">
            <text:p>Año 5</text:p>
          </table:table-cell>
          <table:table-cell table:style-name="ce121" office:value-type="string" calcext:value-type="string">
            <text:p>Año 6</text:p>
          </table:table-cell>
          <table:table-cell table:style-name="ce121" office:value-type="string" calcext:value-type="string">
            <text:p>Año 7</text:p>
          </table:table-cell>
          <table:table-cell table:style-name="ce137" office:value-type="string" calcext:value-type="string">
            <text:p>Año 8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Cantidad producida</text:p>
          </table:table-cell>
          <table:table-cell table:style-name="ce44"/>
          <table:table-cell table:style-name="ce66"/>
          <table:table-cell table:style-name="ce66" table:formula="of:=[.E99]" office:value-type="float" office:value="350000" calcext:value-type="float">
            <text:p>350000.0</text:p>
          </table:table-cell>
          <table:table-cell table:style-name="ce66" table:formula="of:=[.E100]" office:value-type="float" office:value="280000" calcext:value-type="float">
            <text:p>280000.0</text:p>
          </table:table-cell>
          <table:table-cell table:style-name="ce66" table:formula="of:=[.E101]" office:value-type="float" office:value="280000" calcext:value-type="float">
            <text:p>280000.0</text:p>
          </table:table-cell>
          <table:table-cell table:style-name="ce66" table:formula="of:=[.E102]" office:value-type="float" office:value="280000" calcext:value-type="float">
            <text:p>280000.0</text:p>
          </table:table-cell>
          <table:table-cell table:style-name="ce66" table:formula="of:=[.E103]" office:value-type="float" office:value="364000" calcext:value-type="float">
            <text:p>364000.0</text:p>
          </table:table-cell>
          <table:table-cell table:style-name="ce66" table:formula="of:=[.E104]" office:value-type="float" office:value="364000" calcext:value-type="float">
            <text:p>364000.0</text:p>
          </table:table-cell>
          <table:table-cell table:style-name="ce66" table:formula="of:=[.E105]" office:value-type="float" office:value="447720" calcext:value-type="float">
            <text:p>447720.0</text:p>
          </table:table-cell>
          <table:table-cell table:style-name="ce114" table:formula="of:=[.E106]" office:value-type="float" office:value="447720" calcext:value-type="float">
            <text:p>447720.0</text:p>
          </table:table-cell>
          <table:table-cell/>
          <table:table-cell table:style-name="ce47" office:value-type="string" calcext:value-type="string">
            <text:p>Terreno</text:p>
          </table:table-cell>
          <table:table-cell table:style-name="ce70" table:formula="of:=[.C138]" office:value-type="float" office:value="-500000" calcext:value-type="float">
            <text:p>-500000.0</text:p>
          </table:table-cell>
          <table:table-cell table:style-name="ce70" table:number-columns-repeated="8"/>
          <table:table-cell table:number-columns-repeated="16362"/>
        </table:table-row>
        <table:table-row table:style-name="ro1">
          <table:table-cell table:style-name="ce25" office:value-type="string" calcext:value-type="string">
            <text:p>Valor de venta por litro</text:p>
          </table:table-cell>
          <table:table-cell table:style-name="ce16"/>
          <table:table-cell table:style-name="ce67"/>
          <table:table-cell table:number-columns-repeated="8" table:style-name="ce67" office:value-type="float" office:value="40" calcext:value-type="float">
            <text:p>40.0</text:p>
          </table:table-cell>
          <table:table-cell/>
          <table:table-cell table:style-name="ce47" office:value-type="string" calcext:value-type="string">
            <text:p>Infraestructura</text:p>
          </table:table-cell>
          <table:table-cell table:style-name="ce70" table:formula="of:=[.C137]" office:value-type="float" office:value="-3500000" calcext:value-type="float">
            <text:p>-3500000.0</text:p>
          </table:table-cell>
          <table:table-cell table:style-name="ce70" table:number-columns-repeated="8"/>
          <table:table-cell table:number-columns-repeated="16362"/>
        </table:table-row>
        <table:table-row table:style-name="ro1">
          <table:table-cell table:style-name="ce26" office:value-type="string" calcext:value-type="string">
            <text:p>Ingreso por venta netas</text:p>
          </table:table-cell>
          <table:table-cell table:style-name="ce45"/>
          <table:table-cell table:style-name="ce67"/>
          <table:table-cell table:style-name="ce83" table:formula="of:=[.D110]*[.D111]" office:value-type="float" office:value="14000000" calcext:value-type="float">
            <text:p>14000000.0</text:p>
          </table:table-cell>
          <table:table-cell table:style-name="ce83" table:formula="of:=[.E110]*[.E111]" office:value-type="float" office:value="11200000" calcext:value-type="float">
            <text:p>11200000.0</text:p>
          </table:table-cell>
          <table:table-cell table:style-name="ce83" table:formula="of:=[.F110]*[.F111]" office:value-type="float" office:value="11200000" calcext:value-type="float">
            <text:p>11200000.0</text:p>
          </table:table-cell>
          <table:table-cell table:style-name="ce83" table:formula="of:=[.G110]*[.G111]" office:value-type="float" office:value="11200000" calcext:value-type="float">
            <text:p>11200000.0</text:p>
          </table:table-cell>
          <table:table-cell table:style-name="ce83" table:formula="of:=[.H110]*[.H111]" office:value-type="float" office:value="14560000" calcext:value-type="float">
            <text:p>14560000.0</text:p>
          </table:table-cell>
          <table:table-cell table:style-name="ce83" table:formula="of:=[.I110]*[.I111]" office:value-type="float" office:value="14560000" calcext:value-type="float">
            <text:p>14560000.0</text:p>
          </table:table-cell>
          <table:table-cell table:style-name="ce83" table:formula="of:=[.J110]*[.J111]" office:value-type="float" office:value="17908800" calcext:value-type="float">
            <text:p>17908800.0</text:p>
          </table:table-cell>
          <table:table-cell table:style-name="ce115" table:formula="of:=[.K110]*[.K111]" office:value-type="float" office:value="17908800" calcext:value-type="float">
            <text:p>17908800.0</text:p>
          </table:table-cell>
          <table:table-cell/>
          <table:table-cell table:style-name="ce122" office:value-type="string" calcext:value-type="string">
            <text:p>Linea de producción</text:p>
          </table:table-cell>
          <table:table-cell table:style-name="ce70" table:formula="of:=[.C139]" office:value-type="float" office:value="-1600000" calcext:value-type="float">
            <text:p>-1600000.0</text:p>
          </table:table-cell>
          <table:table-cell table:style-name="ce70" table:number-columns-repeated="5"/>
          <table:table-cell table:style-name="ce70" table:formula="of:=[.I139]" office:value-type="float" office:value="-800000" calcext:value-type="float">
            <text:p>-800000.0</text:p>
          </table:table-cell>
          <table:table-cell table:style-name="ce70" table:number-columns-repeated="2"/>
          <table:table-cell table:number-columns-repeated="16362"/>
        </table:table-row>
        <table:table-row table:style-name="ro1">
          <table:table-cell table:style-name="ce26" office:value-type="string" calcext:value-type="string">
            <text:p>Costos Directos de producción</text:p>
          </table:table-cell>
          <table:table-cell table:style-name="ce16"/>
          <table:table-cell table:style-name="ce67"/>
          <table:table-cell table:style-name="ce67" table:formula="of:=[.D110]*[.$E$69]*(-1)" office:value-type="float" office:value="-7906500" calcext:value-type="float">
            <office:annotation draw:style-name="gr6" draw:text-style-name="P3" svg:width="3.539cm" svg:height="1.957cm" svg:x="8.218cm" svg:y="51.567cm" draw:caption-point-x="7.238cm" draw:caption-point-y="-1.18cm">
              <dc:creator>Edison Achalma Mendoza</dc:creator>
              <dc:date>2024-07-31T03:29:00</dc:date>
              <text:p>UP:</text:p>
              <text:p><text:span text:style-name="T2"/></text:p>
            </office:annotation>
            <text:p>-7906500.0</text:p>
          </table:table-cell>
          <table:table-cell table:style-name="ce67" table:formula="of:=[.E110]*[.$E$69]*(-1)" office:value-type="float" office:value="-6325200" calcext:value-type="float">
            <text:p>-6325200.0</text:p>
          </table:table-cell>
          <table:table-cell table:style-name="ce67" table:formula="of:=[.F110]*[.$E$69]*(-1)" office:value-type="float" office:value="-6325200" calcext:value-type="float">
            <text:p>-6325200.0</text:p>
          </table:table-cell>
          <table:table-cell table:style-name="ce67" table:formula="of:=[.G110]*[.$E$69]*(-1)" office:value-type="float" office:value="-6325200" calcext:value-type="float">
            <text:p>-6325200.0</text:p>
          </table:table-cell>
          <table:table-cell table:style-name="ce67" table:formula="of:=[.H110]*[.$E$69]*(-1)" office:value-type="float" office:value="-8222760" calcext:value-type="float">
            <text:p>-8222760.0</text:p>
          </table:table-cell>
          <table:table-cell table:style-name="ce67" table:formula="of:=[.I110]*[.$E$69]*(-1)" office:value-type="float" office:value="-8222760" calcext:value-type="float">
            <text:p>-8222760.0</text:p>
          </table:table-cell>
          <table:table-cell table:style-name="ce67" table:formula="of:=[.J110]*[.$E$69]*(-1)" office:value-type="float" office:value="-10113994.8" calcext:value-type="float">
            <text:p>-10113994.8</text:p>
          </table:table-cell>
          <table:table-cell table:style-name="ce116" table:formula="of:=[.K110]*[.$E$69]*(-1)" office:value-type="float" office:value="-10113994.8" calcext:value-type="float">
            <text:p>-10113994.8</text:p>
          </table:table-cell>
          <table:table-cell/>
          <table:table-cell table:style-name="ce122" office:value-type="string" calcext:value-type="string">
            <text:p>Recupero de terreno</text:p>
          </table:table-cell>
          <table:table-cell table:style-name="ce70" table:number-columns-repeated="8"/>
          <table:table-cell table:style-name="ce70" table:formula="of:=-[.N110]" office:value-type="float" office:value="500000" calcext:value-type="float">
            <text:p>500000.0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Royalty</text:p>
          </table:table-cell>
          <table:table-cell table:style-name="ce16"/>
          <table:table-cell table:style-name="ce67"/>
          <table:table-cell table:style-name="ce67" table:formula="of:=[.D112]*0.05*(-1)" office:value-type="float" office:value="-700000" calcext:value-type="float">
            <text:p>-700000.0</text:p>
          </table:table-cell>
          <table:table-cell table:style-name="ce67" table:formula="of:=[.E112]*0.05*(-1)" office:value-type="float" office:value="-560000" calcext:value-type="float">
            <text:p>-560000.0</text:p>
          </table:table-cell>
          <table:table-cell table:style-name="ce67" table:formula="of:=[.F112]*0.05*(-1)" office:value-type="float" office:value="-560000" calcext:value-type="float">
            <text:p>-560000.0</text:p>
          </table:table-cell>
          <table:table-cell table:style-name="ce67" table:formula="of:=[.G112]*0.03*(-1)" office:value-type="float" office:value="-336000" calcext:value-type="float">
            <text:p>-336000.0</text:p>
          </table:table-cell>
          <table:table-cell table:style-name="ce67" table:formula="of:=[.H112]*0.03*(-1)" office:value-type="float" office:value="-436800" calcext:value-type="float">
            <text:p>-436800.0</text:p>
          </table:table-cell>
          <table:table-cell table:style-name="ce67" table:formula="of:=[.I112]*0.03*(-1)" office:value-type="float" office:value="-436800" calcext:value-type="float">
            <text:p>-436800.0</text:p>
          </table:table-cell>
          <table:table-cell table:style-name="ce67" table:formula="of:=[.J112]*0.03*(-1)" office:value-type="float" office:value="-537264" calcext:value-type="float">
            <text:p>-537264.0</text:p>
          </table:table-cell>
          <table:table-cell table:style-name="ce116" table:formula="of:=[.K112]*0.03*(-1)" office:value-type="float" office:value="-537264" calcext:value-type="float">
            <text:p>-537264.0</text:p>
          </table:table-cell>
          <table:table-cell/>
          <table:table-cell table:style-name="ce122" office:value-type="string" calcext:value-type="string">
            <text:p>venta de AF</text:p>
          </table:table-cell>
          <table:table-cell table:style-name="ce70" table:number-columns-repeated="8"/>
          <table:table-cell table:style-name="ce70" table:formula="of:=[$'Deprec. y VR'.I8]" office:value-type="float" office:value="2065000" calcext:value-type="float">
            <text:p>2065000.0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Gastos Administrativos</text:p>
          </table:table-cell>
          <table:table-cell table:style-name="ce16"/>
          <table:table-cell table:style-name="ce67"/>
          <table:table-cell table:style-name="ce83" table:formula="of:=30000*12*(-1)" office:value-type="float" office:value="-360000" calcext:value-type="float">
            <text:p>-360000.0</text:p>
          </table:table-cell>
          <table:table-cell table:style-name="ce83" table:formula="of:=30000*12*(-1)" office:value-type="float" office:value="-360000" calcext:value-type="float">
            <text:p>-360000.0</text:p>
          </table:table-cell>
          <table:table-cell table:style-name="ce83" table:formula="of:=30000*12*(-1)" office:value-type="float" office:value="-360000" calcext:value-type="float">
            <text:p>-360000.0</text:p>
          </table:table-cell>
          <table:table-cell table:style-name="ce83" table:formula="of:=30000*12*(-1)" office:value-type="float" office:value="-360000" calcext:value-type="float">
            <text:p>-360000.0</text:p>
          </table:table-cell>
          <table:table-cell table:style-name="ce83" table:formula="of:=30000*12*(-1)" office:value-type="float" office:value="-360000" calcext:value-type="float">
            <text:p>-360000.0</text:p>
          </table:table-cell>
          <table:table-cell table:style-name="ce83" table:formula="of:=30000*12*(-1)" office:value-type="float" office:value="-360000" calcext:value-type="float">
            <text:p>-360000.0</text:p>
          </table:table-cell>
          <table:table-cell table:style-name="ce83" table:formula="of:=30000*12*(-1)" office:value-type="float" office:value="-360000" calcext:value-type="float">
            <text:p>-360000.0</text:p>
          </table:table-cell>
          <table:table-cell table:style-name="ce83" table:formula="of:=30000*12*(-1)" office:value-type="float" office:value="-360000" calcext:value-type="float">
            <text:p>-360000.0</text:p>
          </table:table-cell>
          <table:table-cell/>
          <table:table-cell table:style-name="ce122" office:value-type="string" calcext:value-type="string">
            <text:p>Capital de trabajo</text:p>
          </table:table-cell>
          <table:table-cell table:style-name="ce70" table:formula="of:=[.C81]" office:value-type="float" office:value="-1976625" calcext:value-type="float">
            <text:p>-1976625.0</text:p>
          </table:table-cell>
          <table:table-cell table:style-name="ce70" table:formula="of:=[.C82]" office:value-type="float" office:value="395325" calcext:value-type="float">
            <text:p>395325.0</text:p>
          </table:table-cell>
          <table:table-cell table:style-name="ce70" table:number-columns-repeated="2"/>
          <table:table-cell table:style-name="ce70" table:formula="of:=[.C85]" office:value-type="float" office:value="-474390" calcext:value-type="float">
            <text:p>-474390.0</text:p>
          </table:table-cell>
          <table:table-cell table:style-name="ce70"/>
          <table:table-cell table:style-name="ce70" table:formula="of:=[.C87]" office:value-type="float" office:value="-472808.7" calcext:value-type="float">
            <text:p>-472808.7</text:p>
          </table:table-cell>
          <table:table-cell table:style-name="ce70" table:number-columns-repeated="2"/>
          <table:table-cell table:number-columns-repeated="16362"/>
        </table:table-row>
        <table:table-row table:style-name="ro1">
          <table:table-cell table:style-name="ce26" office:value-type="string" calcext:value-type="string">
            <text:p>Remuneraciones </text:p>
          </table:table-cell>
          <table:table-cell table:style-name="ce16"/>
          <table:table-cell table:style-name="ce67"/>
          <table:table-cell table:style-name="ce83" table:formula="of:=-[$Planillas.$I$8]" office:value-type="float" office:value="-413655" calcext:value-type="float">
            <text:p>-413655.0</text:p>
          </table:table-cell>
          <table:table-cell table:style-name="ce83" table:formula="of:=-[$Planillas.$I$8]" office:value-type="float" office:value="-413655" calcext:value-type="float">
            <text:p>-413655.0</text:p>
          </table:table-cell>
          <table:table-cell table:style-name="ce83" table:formula="of:=-[$Planillas.$I$8]" office:value-type="float" office:value="-413655" calcext:value-type="float">
            <text:p>-413655.0</text:p>
          </table:table-cell>
          <table:table-cell table:style-name="ce83" table:formula="of:=[.F116]" office:value-type="float" office:value="-413655" calcext:value-type="float">
            <text:p>-413655.0</text:p>
          </table:table-cell>
          <table:table-cell table:style-name="ce83" table:formula="of:=[.G116]" office:value-type="float" office:value="-413655" calcext:value-type="float">
            <text:p>-413655.0</text:p>
          </table:table-cell>
          <table:table-cell table:style-name="ce83" table:formula="of:=[.H116]" office:value-type="float" office:value="-413655" calcext:value-type="float">
            <text:p>-413655.0</text:p>
          </table:table-cell>
          <table:table-cell table:style-name="ce83" table:formula="of:=[.I116]" office:value-type="float" office:value="-413655" calcext:value-type="float">
            <text:p>-413655.0</text:p>
          </table:table-cell>
          <table:table-cell table:style-name="ce115" table:formula="of:=[.J116]" office:value-type="float" office:value="-413655" calcext:value-type="float">
            <text:p>-413655.0</text:p>
          </table:table-cell>
          <table:table-cell/>
          <table:table-cell table:style-name="ce122" office:value-type="string" calcext:value-type="string">
            <text:p>Recupero de KW</text:p>
          </table:table-cell>
          <table:table-cell table:style-name="ce70" table:number-columns-repeated="8"/>
          <table:table-cell table:style-name="ce70" table:formula="of:=-SUM([.N115:.V115])" office:value-type="float" office:value="2528498.7" calcext:value-type="float">
            <text:p>2528498.7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Deprec. Infraestructura</text:p>
          </table:table-cell>
          <table:table-cell table:style-name="ce16"/>
          <table:table-cell table:style-name="ce67"/>
          <table:table-cell table:style-name="ce83" table:formula="of:=[.E58]/20*(-1)" office:value-type="float" office:value="-175000" calcext:value-type="float">
            <text:p>-175000.0</text:p>
          </table:table-cell>
          <table:table-cell table:style-name="ce67" table:formula="of:=[.D117]" office:value-type="float" office:value="-175000" calcext:value-type="float">
            <text:p>-175000.0</text:p>
          </table:table-cell>
          <table:table-cell table:style-name="ce67" table:formula="of:=[.E117]" office:value-type="float" office:value="-175000" calcext:value-type="float">
            <text:p>-175000.0</text:p>
          </table:table-cell>
          <table:table-cell table:style-name="ce67" table:formula="of:=[.F117]" office:value-type="float" office:value="-175000" calcext:value-type="float">
            <text:p>-175000.0</text:p>
          </table:table-cell>
          <table:table-cell table:style-name="ce67" table:formula="of:=[.G117]" office:value-type="float" office:value="-175000" calcext:value-type="float">
            <text:p>-175000.0</text:p>
          </table:table-cell>
          <table:table-cell table:style-name="ce67" table:formula="of:=[.H117]" office:value-type="float" office:value="-175000" calcext:value-type="float">
            <text:p>-175000.0</text:p>
          </table:table-cell>
          <table:table-cell table:style-name="ce67" table:formula="of:=[.I117]" office:value-type="float" office:value="-175000" calcext:value-type="float">
            <text:p>-175000.0</text:p>
          </table:table-cell>
          <table:table-cell table:style-name="ce116" table:formula="of:=[.J117]" office:value-type="float" office:value="-175000" calcext:value-type="float">
            <text:p>-175000.0</text:p>
          </table:table-cell>
          <table:table-cell/>
          <table:table-cell table:style-name="ce123" office:value-type="string" calcext:value-type="string">
            <text:p>Flujo de Inversión y Liquidación</text:p>
          </table:table-cell>
          <table:table-cell table:style-name="ce68" table:formula="of:=[.N110]+[.N111]+[.N112]+[.N113]+[.N114]+[.N115]+[.N116]" office:value-type="float" office:value="-7576625" calcext:value-type="float">
            <text:p>-7576625.0</text:p>
          </table:table-cell>
          <table:table-cell table:style-name="ce68" table:formula="of:=[.O110]+[.O111]+[.O112]+[.O113]+[.O114]+[.O115]+[.O116]" office:value-type="float" office:value="395325" calcext:value-type="float">
            <text:p>395325.0</text:p>
          </table:table-cell>
          <table:table-cell table:style-name="ce68" table:formula="of:=[.P110]+[.P111]+[.P112]+[.P113]+[.P114]+[.P115]+[.P116]" office:value-type="float" office:value="0" calcext:value-type="float">
            <text:p>0.0</text:p>
          </table:table-cell>
          <table:table-cell table:style-name="ce68" table:formula="of:=[.Q110]+[.Q111]+[.Q112]+[.Q113]+[.Q114]+[.Q115]+[.Q116]" office:value-type="float" office:value="0" calcext:value-type="float">
            <text:p>0.0</text:p>
          </table:table-cell>
          <table:table-cell table:style-name="ce68" table:formula="of:=[.R110]+[.R111]+[.R112]+[.R113]+[.R114]+[.R115]+[.R116]" office:value-type="float" office:value="-474390" calcext:value-type="float">
            <text:p>-474390.0</text:p>
          </table:table-cell>
          <table:table-cell table:style-name="ce68" table:formula="of:=[.S110]+[.S111]+[.S112]+[.S113]+[.S114]+[.S115]+[.S116]" office:value-type="float" office:value="0" calcext:value-type="float">
            <text:p>0.0</text:p>
          </table:table-cell>
          <table:table-cell table:style-name="ce68" table:formula="of:=[.T110]+[.T111]+[.T112]+[.T113]+[.T114]+[.T115]+[.T116]" office:value-type="float" office:value="-1272808.7" calcext:value-type="float">
            <text:p>-1272808.7</text:p>
          </table:table-cell>
          <table:table-cell table:style-name="ce68" table:formula="of:=[.U110]+[.U111]+[.U112]+[.U113]+[.U114]+[.U115]+[.U116]" office:value-type="float" office:value="0" calcext:value-type="float">
            <text:p>0.0</text:p>
          </table:table-cell>
          <table:table-cell table:style-name="ce68" table:formula="of:=[.V110]+[.V111]+[.V112]+[.V113]+[.V114]+[.V115]+[.V116]" office:value-type="float" office:value="5093498.7" calcext:value-type="float">
            <text:p>5093498.7</text:p>
          </table:table-cell>
          <table:table-cell table:style-name="ce108"/>
          <table:table-cell table:number-columns-repeated="16361"/>
        </table:table-row>
        <table:table-row table:style-name="ro1">
          <table:table-cell table:style-name="ce26" office:value-type="string" calcext:value-type="string">
            <text:p>Deprec.Líneas Antiguas</text:p>
          </table:table-cell>
          <table:table-cell table:style-name="ce16"/>
          <table:table-cell table:style-name="ce67"/>
          <table:table-cell table:style-name="ce67" table:formula="of:=[.E59]/10*(-1)" office:value-type="float" office:value="-160000" calcext:value-type="float">
            <text:p>-160000.0</text:p>
          </table:table-cell>
          <table:table-cell table:style-name="ce67" table:formula="of:=[.D118]" office:value-type="float" office:value="-160000" calcext:value-type="float">
            <text:p>-160000.0</text:p>
          </table:table-cell>
          <table:table-cell table:style-name="ce67" table:formula="of:=[.E118]" office:value-type="float" office:value="-160000" calcext:value-type="float">
            <text:p>-160000.0</text:p>
          </table:table-cell>
          <table:table-cell table:style-name="ce67" table:formula="of:=[.F118]" office:value-type="float" office:value="-160000" calcext:value-type="float">
            <text:p>-160000.0</text:p>
          </table:table-cell>
          <table:table-cell table:style-name="ce67" table:formula="of:=[.G118]" office:value-type="float" office:value="-160000" calcext:value-type="float">
            <text:p>-160000.0</text:p>
          </table:table-cell>
          <table:table-cell table:style-name="ce67" table:formula="of:=[.H118]" office:value-type="float" office:value="-160000" calcext:value-type="float">
            <text:p>-160000.0</text:p>
          </table:table-cell>
          <table:table-cell table:style-name="ce67" table:formula="of:=[.I118]" office:value-type="float" office:value="-160000" calcext:value-type="float">
            <text:p>-160000.0</text:p>
          </table:table-cell>
          <table:table-cell table:style-name="ce116" table:formula="of:=[.J118]" office:value-type="float" office:value="-160000" calcext:value-type="float">
            <text:p>-160000.0</text:p>
          </table:table-cell>
          <table:table-cell/>
          <table:table-cell table:style-name="ce124" office:value-type="string" calcext:value-type="string">
            <text:p>Ventas</text:p>
          </table:table-cell>
          <table:table-cell table:style-name="ce67"/>
          <table:table-cell table:style-name="ce67" table:formula="of:=[.D112]" office:value-type="float" office:value="14000000" calcext:value-type="float">
            <text:p>14000000.0</text:p>
          </table:table-cell>
          <table:table-cell table:style-name="ce67" table:formula="of:=[.E112]" office:value-type="float" office:value="11200000" calcext:value-type="float">
            <text:p>11200000.0</text:p>
          </table:table-cell>
          <table:table-cell table:style-name="ce67" table:formula="of:=[.F112]" office:value-type="float" office:value="11200000" calcext:value-type="float">
            <text:p>11200000.0</text:p>
          </table:table-cell>
          <table:table-cell table:style-name="ce67" table:formula="of:=[.G112]" office:value-type="float" office:value="11200000" calcext:value-type="float">
            <text:p>11200000.0</text:p>
          </table:table-cell>
          <table:table-cell table:style-name="ce67" table:formula="of:=[.H112]" office:value-type="float" office:value="14560000" calcext:value-type="float">
            <text:p>14560000.0</text:p>
          </table:table-cell>
          <table:table-cell table:style-name="ce67" table:formula="of:=[.I112]" office:value-type="float" office:value="14560000" calcext:value-type="float">
            <text:p>14560000.0</text:p>
          </table:table-cell>
          <table:table-cell table:style-name="ce67" table:formula="of:=[.J112]" office:value-type="float" office:value="17908800" calcext:value-type="float">
            <text:p>17908800.0</text:p>
          </table:table-cell>
          <table:table-cell table:style-name="ce67" table:formula="of:=[.K112]" office:value-type="float" office:value="17908800" calcext:value-type="float">
            <text:p>17908800.0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Deprec. Línea Nueva</text:p>
          </table:table-cell>
          <table:table-cell table:style-name="ce16"/>
          <table:table-cell table:style-name="ce67" table:number-columns-repeated="7"/>
          <table:table-cell table:style-name="ce83" table:formula="of:=800000/10*(-1)" office:value-type="float" office:value="-80000" calcext:value-type="float">
            <text:p>-80000.0</text:p>
          </table:table-cell>
          <table:table-cell table:style-name="ce116" table:formula="of:=[.J119]" office:value-type="float" office:value="-80000" calcext:value-type="float">
            <text:p>-80000.0</text:p>
          </table:table-cell>
          <table:table-cell table:formula="of:=SUM([.K117:.K119])" office:value-type="float" office:value="-415000" calcext:value-type="float">
            <office:annotation draw:style-name="gr2" draw:text-style-name="P2" svg:width="3.929cm" svg:height="6.521cm" svg:x="34.563cm" svg:y="52.811cm" draw:caption-point-x="1.698cm" draw:caption-point-y="0.274cm">
              <dc:creator>Edison Achalma Mendoza</dc:creator>
              <dc:date>2024-07-31T03:29:00</dc:date>
              <text:p>[Threaded comment]</text:p>
              <text:p/>
              <text:p>Your version of Excel allows you to read this threaded comment; however, any edits to it will get removed if the file is opened in a newer version of Excel. Learn more: https://go.microsoft.com/fwlink/?linkid=870924</text:p>
              <text:p/>
              <text:p>Comment:</text:p>
              <text:p><text:s text:c="4"/>Depreciaciones.</text:p>
            </office:annotation>
            <text:p>-415000.0</text:p>
          </table:table-cell>
          <table:table-cell table:style-name="ce124" office:value-type="string" calcext:value-type="string">
            <text:p>Costos de producción</text:p>
          </table:table-cell>
          <table:table-cell table:style-name="ce67"/>
          <table:table-cell table:style-name="ce67" table:formula="of:=[.D113]" office:value-type="float" office:value="-7906500" calcext:value-type="float">
            <text:p>-7906500.0</text:p>
          </table:table-cell>
          <table:table-cell table:style-name="ce67" table:formula="of:=[.E113]" office:value-type="float" office:value="-6325200" calcext:value-type="float">
            <text:p>-6325200.0</text:p>
          </table:table-cell>
          <table:table-cell table:style-name="ce67" table:formula="of:=[.F113]" office:value-type="float" office:value="-6325200" calcext:value-type="float">
            <text:p>-6325200.0</text:p>
          </table:table-cell>
          <table:table-cell table:style-name="ce67" table:formula="of:=[.G113]" office:value-type="float" office:value="-6325200" calcext:value-type="float">
            <text:p>-6325200.0</text:p>
          </table:table-cell>
          <table:table-cell table:style-name="ce67" table:formula="of:=[.H113]" office:value-type="float" office:value="-8222760" calcext:value-type="float">
            <text:p>-8222760.0</text:p>
          </table:table-cell>
          <table:table-cell table:style-name="ce67" table:formula="of:=[.I113]" office:value-type="float" office:value="-8222760" calcext:value-type="float">
            <text:p>-8222760.0</text:p>
          </table:table-cell>
          <table:table-cell table:style-name="ce67" table:formula="of:=[.J113]" office:value-type="float" office:value="-10113994.8" calcext:value-type="float">
            <text:p>-10113994.8</text:p>
          </table:table-cell>
          <table:table-cell table:style-name="ce67" table:formula="of:=[.K113]" office:value-type="float" office:value="-10113994.8" calcext:value-type="float">
            <text:p>-10113994.8</text:p>
          </table:table-cell>
          <table:table-cell table:number-columns-repeated="16362"/>
        </table:table-row>
        <table:table-row table:style-name="ro1">
          <table:table-cell table:style-name="ce26"/>
          <table:table-cell table:style-name="ce16"/>
          <table:table-cell table:style-name="ce67" table:number-columns-repeated="7"/>
          <table:table-cell table:style-name="ce83"/>
          <table:table-cell table:style-name="ce116"/>
          <table:table-cell/>
          <table:table-cell table:style-name="ce124" office:value-type="string" calcext:value-type="string">
            <text:p>Royalty</text:p>
          </table:table-cell>
          <table:table-cell table:style-name="ce67"/>
          <table:table-cell table:style-name="ce67" table:formula="of:=[.D114]" office:value-type="float" office:value="-700000" calcext:value-type="float">
            <text:p>-700000.0</text:p>
          </table:table-cell>
          <table:table-cell table:style-name="ce67" table:formula="of:=[.E114]" office:value-type="float" office:value="-560000" calcext:value-type="float">
            <text:p>-560000.0</text:p>
          </table:table-cell>
          <table:table-cell table:style-name="ce67" table:formula="of:=[.F114]" office:value-type="float" office:value="-560000" calcext:value-type="float">
            <text:p>-560000.0</text:p>
          </table:table-cell>
          <table:table-cell table:style-name="ce67" table:formula="of:=[.G114]" office:value-type="float" office:value="-336000" calcext:value-type="float">
            <text:p>-336000.0</text:p>
          </table:table-cell>
          <table:table-cell table:style-name="ce67" table:formula="of:=[.H114]" office:value-type="float" office:value="-436800" calcext:value-type="float">
            <text:p>-436800.0</text:p>
          </table:table-cell>
          <table:table-cell table:style-name="ce67" table:formula="of:=[.I114]" office:value-type="float" office:value="-436800" calcext:value-type="float">
            <text:p>-436800.0</text:p>
          </table:table-cell>
          <table:table-cell table:style-name="ce67" table:formula="of:=[.J114]" office:value-type="float" office:value="-537264" calcext:value-type="float">
            <text:p>-537264.0</text:p>
          </table:table-cell>
          <table:table-cell table:style-name="ce67" table:formula="of:=[.K114]" office:value-type="float" office:value="-537264" calcext:value-type="float">
            <text:p>-537264.0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Venta de Infraestructura</text:p>
          </table:table-cell>
          <table:table-cell table:style-name="ce16"/>
          <table:table-cell table:style-name="ce67" table:number-columns-repeated="8"/>
          <table:table-cell table:style-name="ce116" table:formula="of:=[.E58]*0.35" office:value-type="float" office:value="1225000" calcext:value-type="float">
            <text:p>1225000.0</text:p>
          </table:table-cell>
          <table:table-cell/>
          <table:table-cell table:style-name="ce124" office:value-type="string" calcext:value-type="string">
            <text:p>Gastos administrativos</text:p>
          </table:table-cell>
          <table:table-cell table:style-name="ce67"/>
          <table:table-cell table:style-name="ce67" table:formula="of:=[.D115]" office:value-type="float" office:value="-360000" calcext:value-type="float">
            <text:p>-360000.0</text:p>
          </table:table-cell>
          <table:table-cell table:style-name="ce67" table:formula="of:=[.E115]" office:value-type="float" office:value="-360000" calcext:value-type="float">
            <text:p>-360000.0</text:p>
          </table:table-cell>
          <table:table-cell table:style-name="ce67" table:formula="of:=[.F115]" office:value-type="float" office:value="-360000" calcext:value-type="float">
            <text:p>-360000.0</text:p>
          </table:table-cell>
          <table:table-cell table:style-name="ce67" table:formula="of:=[.G115]" office:value-type="float" office:value="-360000" calcext:value-type="float">
            <text:p>-360000.0</text:p>
          </table:table-cell>
          <table:table-cell table:style-name="ce67" table:formula="of:=[.H115]" office:value-type="float" office:value="-360000" calcext:value-type="float">
            <text:p>-360000.0</text:p>
          </table:table-cell>
          <table:table-cell table:style-name="ce67" table:formula="of:=[.I115]" office:value-type="float" office:value="-360000" calcext:value-type="float">
            <text:p>-360000.0</text:p>
          </table:table-cell>
          <table:table-cell table:style-name="ce67" table:formula="of:=[.J115]" office:value-type="float" office:value="-360000" calcext:value-type="float">
            <text:p>-360000.0</text:p>
          </table:table-cell>
          <table:table-cell table:style-name="ce67" table:formula="of:=[.K115]" office:value-type="float" office:value="-360000" calcext:value-type="float">
            <text:p>-360000.0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Valor Contable</text:p>
          </table:table-cell>
          <table:table-cell table:style-name="ce16"/>
          <table:table-cell table:style-name="ce67" table:number-columns-repeated="8"/>
          <table:table-cell table:style-name="ce117" table:formula="of:=([.E58]-(([.E58]/20)*8))*(-1)" office:value-type="float" office:value="-2100000" calcext:value-type="float">
            <text:p>-2100000.0</text:p>
          </table:table-cell>
          <table:table-cell/>
          <table:table-cell table:style-name="ce124" office:value-type="string" calcext:value-type="string">
            <text:p>Remuneraciones</text:p>
          </table:table-cell>
          <table:table-cell table:style-name="ce67"/>
          <table:table-cell table:style-name="ce67" table:formula="of:=[.D116]" office:value-type="float" office:value="-413655" calcext:value-type="float">
            <text:p>-413655.0</text:p>
          </table:table-cell>
          <table:table-cell table:style-name="ce67" table:formula="of:=[.E116]" office:value-type="float" office:value="-413655" calcext:value-type="float">
            <text:p>-413655.0</text:p>
          </table:table-cell>
          <table:table-cell table:style-name="ce67" table:formula="of:=[.F116]" office:value-type="float" office:value="-413655" calcext:value-type="float">
            <text:p>-413655.0</text:p>
          </table:table-cell>
          <table:table-cell table:style-name="ce67" table:formula="of:=[.G116]" office:value-type="float" office:value="-413655" calcext:value-type="float">
            <text:p>-413655.0</text:p>
          </table:table-cell>
          <table:table-cell table:style-name="ce67" table:formula="of:=[.H116]" office:value-type="float" office:value="-413655" calcext:value-type="float">
            <text:p>-413655.0</text:p>
          </table:table-cell>
          <table:table-cell table:style-name="ce67" table:formula="of:=[.I116]" office:value-type="float" office:value="-413655" calcext:value-type="float">
            <text:p>-413655.0</text:p>
          </table:table-cell>
          <table:table-cell table:style-name="ce67" table:formula="of:=[.J116]" office:value-type="float" office:value="-413655" calcext:value-type="float">
            <text:p>-413655.0</text:p>
          </table:table-cell>
          <table:table-cell table:style-name="ce67" table:formula="of:=[.K116]" office:value-type="float" office:value="-413655" calcext:value-type="float">
            <text:p>-413655.0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Venta Linea Antigua</text:p>
          </table:table-cell>
          <table:table-cell table:style-name="ce16"/>
          <table:table-cell table:style-name="ce67" table:number-columns-repeated="8"/>
          <table:table-cell table:style-name="ce116" table:formula="of:=[.E59]*0.35" office:value-type="float" office:value="560000" calcext:value-type="float">
            <text:p>560000.0</text:p>
          </table:table-cell>
          <table:table-cell/>
          <table:table-cell table:style-name="ce124" office:value-type="string" calcext:value-type="string">
            <text:p>Pago de IGV</text:p>
          </table:table-cell>
          <table:table-cell table:style-name="ce67" table:formula="of:=[.N137]" office:value-type="float" office:value="0" calcext:value-type="float">
            <text:p>0.0</text:p>
          </table:table-cell>
          <table:table-cell table:style-name="ce67" table:formula="of:=[.O137]" office:value-type="float" office:value="-24030" calcext:value-type="float">
            <text:p>-24030.0</text:p>
          </table:table-cell>
          <table:table-cell table:style-name="ce67" table:formula="of:=[.P137]" office:value-type="float" office:value="-812664" calcext:value-type="float">
            <text:p>-812664.0</text:p>
          </table:table-cell>
          <table:table-cell table:style-name="ce67" table:formula="of:=[.Q137]" office:value-type="float" office:value="-812664" calcext:value-type="float">
            <text:p>-812664.0</text:p>
          </table:table-cell>
          <table:table-cell table:style-name="ce67" table:formula="of:=[.R137]" office:value-type="float" office:value="-812664" calcext:value-type="float">
            <text:p>-812664.0</text:p>
          </table:table-cell>
          <table:table-cell table:style-name="ce67" table:formula="of:=[.S137]" office:value-type="float" office:value="-1075903.2" calcext:value-type="float">
            <text:p>-1075903.2</text:p>
          </table:table-cell>
          <table:table-cell table:style-name="ce67" table:formula="of:=[.T137]" office:value-type="float" office:value="-931903.2" calcext:value-type="float">
            <text:p>-931903.2</text:p>
          </table:table-cell>
          <table:table-cell table:style-name="ce67" table:formula="of:=[.U137]" office:value-type="float" office:value="-1338264.936" calcext:value-type="float">
            <text:p>-1338264.9</text:p>
          </table:table-cell>
          <table:table-cell table:style-name="ce67" table:formula="of:=[.V137]" office:value-type="float" office:value="-1338264.936" calcext:value-type="float">
            <text:p>-1338264.9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Valor en Libro Linea Antigua</text:p>
          </table:table-cell>
          <table:table-cell table:style-name="ce16"/>
          <table:table-cell table:style-name="ce67" table:number-columns-repeated="8"/>
          <table:table-cell table:style-name="ce118" table:formula="of:=([.E59]-([.E59]/10)*8)*(-1)" office:value-type="float" office:value="-320000" calcext:value-type="float">
            <text:p>-320000.0</text:p>
          </table:table-cell>
          <table:table-cell/>
          <table:table-cell table:style-name="ce124" office:value-type="string" calcext:value-type="string">
            <text:p>Impuestos </text:p>
          </table:table-cell>
          <table:table-cell table:style-name="ce67"/>
          <table:table-cell table:style-name="ce67" table:formula="of:=[.D130]" office:value-type="float" office:value="-1264029.275" calcext:value-type="float">
            <text:p>-1264029.3</text:p>
          </table:table-cell>
          <table:table-cell table:style-name="ce67" table:formula="of:=[.E130]" office:value-type="float" office:value="-945812.775" calcext:value-type="float">
            <text:p>-945812.8</text:p>
          </table:table-cell>
          <table:table-cell table:style-name="ce67" table:formula="of:=[.F130]" office:value-type="float" office:value="-945812.775" calcext:value-type="float">
            <text:p>-945812.8</text:p>
          </table:table-cell>
          <table:table-cell table:style-name="ce67" table:formula="of:=[.G130]" office:value-type="float" office:value="-1011892.775" calcext:value-type="float">
            <text:p>-1011892.8</text:p>
          </table:table-cell>
          <table:table-cell table:style-name="ce67" table:formula="of:=[.H130]" office:value-type="float" office:value="-1413576.575" calcext:value-type="float">
            <text:p>-1413576.6</text:p>
          </table:table-cell>
          <table:table-cell table:style-name="ce67" table:formula="of:=[.I130]" office:value-type="float" office:value="-1413576.575" calcext:value-type="float">
            <text:p>-1413576.6</text:p>
          </table:table-cell>
          <table:table-cell table:style-name="ce67" table:formula="of:=[.J130]" office:value-type="float" office:value="-1790321.429" calcext:value-type="float">
            <text:p>-1790321.4</text:p>
          </table:table-cell>
          <table:table-cell table:style-name="ce67" table:formula="of:=[.K130]" office:value-type="float" office:value="-1496796.429" calcext:value-type="float">
            <text:p>-1496796.4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Venta Línea Nueva</text:p>
          </table:table-cell>
          <table:table-cell table:style-name="ce16"/>
          <table:table-cell table:style-name="ce67" table:number-columns-repeated="8"/>
          <table:table-cell table:style-name="ce116" table:formula="of:=[.E59]/2*0.35" office:value-type="float" office:value="280000" calcext:value-type="float">
            <text:p>280000.0</text:p>
          </table:table-cell>
          <table:table-cell/>
          <table:table-cell table:style-name="ce123" office:value-type="string" calcext:value-type="string">
            <text:p>Flujo Operativo </text:p>
          </table:table-cell>
          <table:table-cell table:style-name="ce68" table:formula="of:=[.N118]+[.N119]+[.N120]+[.N121]+[.N122]+[.N123]+[.N124]" office:value-type="float" office:value="0" calcext:value-type="float">
            <text:p>0.0</text:p>
          </table:table-cell>
          <table:table-cell table:style-name="ce68" table:formula="of:=[.O118]+[.O119]+[.O120]+[.O121]+[.O122]+[.O123]+[.O124]" office:value-type="float" office:value="3331785.725" calcext:value-type="float">
            <text:p>3331785.7</text:p>
          </table:table-cell>
          <table:table-cell table:style-name="ce68" table:formula="of:=[.P118]+[.P119]+[.P120]+[.P121]+[.P122]+[.P123]+[.P124]" office:value-type="float" office:value="1782668.225" calcext:value-type="float">
            <text:p>1782668.2</text:p>
          </table:table-cell>
          <table:table-cell table:style-name="ce68" table:formula="of:=[.Q118]+[.Q119]+[.Q120]+[.Q121]+[.Q122]+[.Q123]+[.Q124]" office:value-type="float" office:value="1782668.225" calcext:value-type="float">
            <text:p>1782668.2</text:p>
          </table:table-cell>
          <table:table-cell table:style-name="ce68" table:formula="of:=[.R118]+[.R119]+[.R120]+[.R121]+[.R122]+[.R123]+[.R124]" office:value-type="float" office:value="1940588.225" calcext:value-type="float">
            <text:p>1940588.2</text:p>
          </table:table-cell>
          <table:table-cell table:style-name="ce68" table:formula="of:=[.S118]+[.S119]+[.S120]+[.S121]+[.S122]+[.S123]+[.S124]" office:value-type="float" office:value="2637305.225" calcext:value-type="float">
            <text:p>2637305.2</text:p>
          </table:table-cell>
          <table:table-cell table:style-name="ce68" table:formula="of:=[.T118]+[.T119]+[.T120]+[.T121]+[.T122]+[.T123]+[.T124]" office:value-type="float" office:value="2781305.225" calcext:value-type="float">
            <text:p>2781305.2</text:p>
          </table:table-cell>
          <table:table-cell table:style-name="ce68" table:formula="of:=[.U118]+[.U119]+[.U120]+[.U121]+[.U122]+[.U123]+[.U124]" office:value-type="float" office:value="3355299.835" calcext:value-type="float">
            <text:p>3355299.8</text:p>
          </table:table-cell>
          <table:table-cell table:style-name="ce68" table:formula="of:=[.V118]+[.V119]+[.V120]+[.V121]+[.V122]+[.V123]+[.V124]" office:value-type="float" office:value="3648824.835" calcext:value-type="float">
            <text:p>3648824.8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Valor en libro Linea Nueva</text:p>
          </table:table-cell>
          <table:table-cell table:style-name="ce16"/>
          <table:table-cell table:style-name="ce67" table:number-columns-repeated="8"/>
          <table:table-cell table:style-name="ce118" table:formula="of:=(([.E59]/2)- ([.E59]/2)/10*2)*(-1)" office:value-type="float" office:value="-640000" calcext:value-type="float">
            <text:p>-640000.0</text:p>
          </table:table-cell>
          <table:table-cell/>
          <table:table-cell table:style-name="ce125" office:value-type="string" calcext:value-type="string">
            <text:p>Flujo de Caja Económico</text:p>
          </table:table-cell>
          <table:table-cell table:style-name="ce131" table:formula="of:=[.N117]+[.N125]" office:value-type="float" office:value="-7576625" calcext:value-type="float">
            <text:p>-7576625.0</text:p>
          </table:table-cell>
          <table:table-cell table:style-name="ce131" table:formula="of:=[.O117]+[.O125]" office:value-type="float" office:value="3727110.725" calcext:value-type="float">
            <text:p>3727110.7</text:p>
          </table:table-cell>
          <table:table-cell table:style-name="ce131" table:formula="of:=[.P117]+[.P125]" office:value-type="float" office:value="1782668.225" calcext:value-type="float">
            <text:p>1782668.2</text:p>
          </table:table-cell>
          <table:table-cell table:style-name="ce131" table:formula="of:=[.Q117]+[.Q125]" office:value-type="float" office:value="1782668.225" calcext:value-type="float">
            <text:p>1782668.2</text:p>
          </table:table-cell>
          <table:table-cell table:style-name="ce131" table:formula="of:=[.R117]+[.R125]" office:value-type="float" office:value="1466198.225" calcext:value-type="float">
            <text:p>1466198.2</text:p>
          </table:table-cell>
          <table:table-cell table:style-name="ce131" table:formula="of:=[.S117]+[.S125]" office:value-type="float" office:value="2637305.225" calcext:value-type="float">
            <text:p>2637305.2</text:p>
          </table:table-cell>
          <table:table-cell table:style-name="ce131" table:formula="of:=[.T117]+[.T125]" office:value-type="float" office:value="1508496.525" calcext:value-type="float">
            <text:p>1508496.5</text:p>
          </table:table-cell>
          <table:table-cell table:style-name="ce131" table:formula="of:=[.U117]+[.U125]" office:value-type="float" office:value="3355299.835" calcext:value-type="float">
            <text:p>3355299.8</text:p>
          </table:table-cell>
          <table:table-cell table:style-name="ce131" table:formula="of:=[.V117]+[.V125]" office:value-type="float" office:value="8742323.535" calcext:value-type="float">
            <text:p>8742323.5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Valor libro de terreno</text:p>
          </table:table-cell>
          <table:table-cell table:style-name="ce16"/>
          <table:table-cell table:style-name="ce67" table:number-columns-repeated="8"/>
          <table:table-cell table:style-name="ce118" table:formula="of:=-[.E60]" office:value-type="float" office:value="-500000" calcext:value-type="float">
            <text:p>-500000.0</text:p>
          </table:table-cell>
          <table:table-cell table:number-columns-repeated="4"/>
          <table:table-cell table:style-name="ce135" table:number-columns-repeated="7"/>
          <table:table-cell table:number-columns-repeated="16362"/>
        </table:table-row>
        <table:table-row table:style-name="ro1">
          <table:table-cell table:style-name="ce25" office:value-type="string" calcext:value-type="string">
            <text:p>Venta de terreno</text:p>
          </table:table-cell>
          <table:table-cell table:style-name="ce16"/>
          <table:table-cell table:style-name="ce67" table:number-columns-repeated="8"/>
          <table:table-cell table:style-name="ce116" office:value-type="float" office:value="500000" calcext:value-type="float">
            <text:p>500000.0</text:p>
          </table:table-cell>
          <table:table-cell table:formula="of:=SUM([.K121:.K128])" office:value-type="float" office:value="-995000" calcext:value-type="float">
            <office:annotation draw:style-name="gr7" draw:text-style-name="P1" svg:width="3.665cm" svg:height="2.371cm" svg:x="34.484cm" svg:y="56.965cm" draw:caption-point-x="1.777cm" draw:caption-point-y="0.169cm">
              <dc:creator>Edison Achalma Mendoza</dc:creator>
              <dc:date>2024-07-31T03:29:00</dc:date>
              <text:p>Edison:</text:p>
              <text:p><text:span text:style-name="T1">Es la pérdia por la venta de activo fijo, que es igual a la perdia que esta en la hoja de depreciaciones.</text:span></text:p>
            </office:annotation>
            <text:p>-995000.0</text:p>
          </table:table-cell>
          <table:table-cell table:number-columns-repeated="2"/>
          <table:table-cell table:style-name="ce135" table:number-columns-repeated="8"/>
          <table:table-cell table:style-name="ce108"/>
          <table:table-cell table:number-columns-repeated="16361"/>
        </table:table-row>
        <table:table-row table:style-name="ro1">
          <table:table-cell table:style-name="ce27" office:value-type="string" calcext:value-type="string">
            <text:p>Utilidad antes de Imp.</text:p>
          </table:table-cell>
          <table:table-cell table:style-name="ce46"/>
          <table:table-cell table:style-name="ce68"/>
          <table:table-cell table:style-name="ce68" table:formula="of:=SUM([.D112:.D128])" office:value-type="float" office:value="4284845" calcext:value-type="float">
            <text:p>4284845.0</text:p>
          </table:table-cell>
          <table:table-cell table:style-name="ce68" table:formula="of:=SUM([.E112:.E128])" office:value-type="float" office:value="3206145" calcext:value-type="float">
            <text:p>3206145.0</text:p>
          </table:table-cell>
          <table:table-cell table:style-name="ce68" table:formula="of:=SUM([.F112:.F128])" office:value-type="float" office:value="3206145" calcext:value-type="float">
            <text:p>3206145.0</text:p>
          </table:table-cell>
          <table:table-cell table:style-name="ce68" table:formula="of:=SUM([.G112:.G128])" office:value-type="float" office:value="3430145" calcext:value-type="float">
            <text:p>3430145.0</text:p>
          </table:table-cell>
          <table:table-cell table:style-name="ce68" table:formula="of:=SUM([.H112:.H128])" office:value-type="float" office:value="4791785" calcext:value-type="float">
            <text:p>4791785.0</text:p>
          </table:table-cell>
          <table:table-cell table:style-name="ce68" table:formula="of:=SUM([.I112:.I128])" office:value-type="float" office:value="4791785" calcext:value-type="float">
            <text:p>4791785.0</text:p>
          </table:table-cell>
          <table:table-cell table:style-name="ce68" table:formula="of:=SUM([.J112:.J128])" office:value-type="float" office:value="6068886.2" calcext:value-type="float">
            <text:p>6068886.2</text:p>
          </table:table-cell>
          <table:table-cell table:style-name="ce119" table:formula="of:=SUM([.K112:.K128])" office:value-type="float" office:value="5073886.2" calcext:value-type="float">
            <text:p>5073886.2</text:p>
          </table:table-cell>
          <table:table-cell/>
          <table:table-cell table:style-name="ce1" office:value-type="string" calcext:value-type="string" table:number-columns-spanned="10" table:number-rows-spanned="1">
            <text:p>PAGO DE IMPUESTO GENERAL A LAS VENTAS</text:p>
          </table:table-cell>
          <table:covered-table-cell table:number-columns-repeated="9" table:style-name="ce6"/>
          <table:table-cell table:number-columns-repeated="16362"/>
        </table:table-row>
        <table:table-row table:style-name="ro1">
          <table:table-cell table:style-name="ce25" office:value-type="string" calcext:value-type="string">
            <text:p>Impuesto ( 29.5%)</text:p>
          </table:table-cell>
          <table:table-cell table:style-name="ce16"/>
          <table:table-cell table:style-name="ce67"/>
          <table:table-cell table:style-name="ce67" table:formula="of:=[.D129]*0.295*(-1)" office:value-type="float" office:value="-1264029.275" calcext:value-type="float">
            <text:p>-1264029.3</text:p>
          </table:table-cell>
          <table:table-cell table:style-name="ce67" table:formula="of:=[.E129]*0.295*(-1)" office:value-type="float" office:value="-945812.775" calcext:value-type="float">
            <text:p>-945812.8</text:p>
          </table:table-cell>
          <table:table-cell table:style-name="ce67" table:formula="of:=[.F129]*0.295*(-1)" office:value-type="float" office:value="-945812.775" calcext:value-type="float">
            <text:p>-945812.8</text:p>
          </table:table-cell>
          <table:table-cell table:style-name="ce67" table:formula="of:=[.G129]*0.295*(-1)" office:value-type="float" office:value="-1011892.775" calcext:value-type="float">
            <text:p>-1011892.8</text:p>
          </table:table-cell>
          <table:table-cell table:style-name="ce67" table:formula="of:=[.H129]*0.295*(-1)" office:value-type="float" office:value="-1413576.575" calcext:value-type="float">
            <text:p>-1413576.6</text:p>
          </table:table-cell>
          <table:table-cell table:style-name="ce67" table:formula="of:=[.I129]*0.295*(-1)" office:value-type="float" office:value="-1413576.575" calcext:value-type="float">
            <text:p>-1413576.6</text:p>
          </table:table-cell>
          <table:table-cell table:style-name="ce67" table:formula="of:=[.J129]*0.295*(-1)" office:value-type="float" office:value="-1790321.429" calcext:value-type="float">
            <text:p>-1790321.4</text:p>
          </table:table-cell>
          <table:table-cell table:style-name="ce67" table:formula="of:=[.K129]*0.295*(-1)" office:value-type="float" office:value="-1496796.429" calcext:value-type="float">
            <text:p>-1496796.4</text:p>
          </table:table-cell>
          <table:table-cell/>
          <table:table-cell table:style-name="ce15" office:value-type="string" calcext:value-type="string">
            <text:p>RUBRO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N130]+1" office:value-type="float" office:value="1" calcext:value-type="float">
            <text:p>1</text:p>
          </table:table-cell>
          <table:table-cell table:style-name="ce15" table:formula="of:=[.O130]+1" office:value-type="float" office:value="2" calcext:value-type="float">
            <text:p>2</text:p>
          </table:table-cell>
          <table:table-cell table:style-name="ce15" table:formula="of:=[.P130]+1" office:value-type="float" office:value="3" calcext:value-type="float">
            <text:p>3</text:p>
          </table:table-cell>
          <table:table-cell table:style-name="ce15" table:formula="of:=[.Q130]+1" office:value-type="float" office:value="4" calcext:value-type="float">
            <text:p>4</text:p>
          </table:table-cell>
          <table:table-cell table:style-name="ce15" table:formula="of:=[.R130]+1" office:value-type="float" office:value="5" calcext:value-type="float">
            <text:p>5</text:p>
          </table:table-cell>
          <table:table-cell table:style-name="ce15" table:formula="of:=[.S130]+1" office:value-type="float" office:value="6" calcext:value-type="float">
            <text:p>6</text:p>
          </table:table-cell>
          <table:table-cell table:style-name="ce15" table:formula="of:=[.T130]+1" office:value-type="float" office:value="7" calcext:value-type="float">
            <text:p>7</text:p>
          </table:table-cell>
          <table:table-cell table:style-name="ce15" table:formula="of:=[.U130]+1" office:value-type="float" office:value="8" calcext:value-type="float">
            <text:p>8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Utilidad Neta</text:p>
          </table:table-cell>
          <table:table-cell table:style-name="ce46"/>
          <table:table-cell table:style-name="ce68"/>
          <table:table-cell table:style-name="ce68" table:formula="of:=[.D129]+[.D130]" office:value-type="float" office:value="3020815.725" calcext:value-type="float">
            <text:p>3020815.7</text:p>
          </table:table-cell>
          <table:table-cell table:style-name="ce68" table:formula="of:=[.E129]+[.E130]" office:value-type="float" office:value="2260332.225" calcext:value-type="float">
            <text:p>2260332.2</text:p>
          </table:table-cell>
          <table:table-cell table:style-name="ce68" table:formula="of:=[.F129]+[.F130]" office:value-type="float" office:value="2260332.225" calcext:value-type="float">
            <text:p>2260332.2</text:p>
          </table:table-cell>
          <table:table-cell table:style-name="ce68" table:formula="of:=[.G129]+[.G130]" office:value-type="float" office:value="2418252.225" calcext:value-type="float">
            <text:p>2418252.2</text:p>
          </table:table-cell>
          <table:table-cell table:style-name="ce68" table:formula="of:=[.H129]+[.H130]" office:value-type="float" office:value="3378208.425" calcext:value-type="float">
            <text:p>3378208.4</text:p>
          </table:table-cell>
          <table:table-cell table:style-name="ce68" table:formula="of:=[.I129]+[.I130]" office:value-type="float" office:value="3378208.425" calcext:value-type="float">
            <text:p>3378208.4</text:p>
          </table:table-cell>
          <table:table-cell table:style-name="ce68" table:formula="of:=[.J129]+[.J130]" office:value-type="float" office:value="4278564.771" calcext:value-type="float">
            <text:p>4278564.8</text:p>
          </table:table-cell>
          <table:table-cell table:style-name="ce119" table:formula="of:=[.K129]+[.K130]" office:value-type="float" office:value="3577089.771" calcext:value-type="float">
            <text:p>3577089.8</text:p>
          </table:table-cell>
          <table:table-cell/>
          <table:table-cell table:style-name="ce3" office:value-type="string" calcext:value-type="string">
            <text:p>Ventas</text:p>
          </table:table-cell>
          <table:table-cell table:style-name="ce67"/>
          <table:table-cell table:style-name="ce67" table:formula="of:=[.O118]" office:value-type="float" office:value="14000000" calcext:value-type="float">
            <text:p>14000000.0</text:p>
          </table:table-cell>
          <table:table-cell table:style-name="ce67" table:formula="of:=[.P118]" office:value-type="float" office:value="11200000" calcext:value-type="float">
            <text:p>11200000.0</text:p>
          </table:table-cell>
          <table:table-cell table:style-name="ce67" table:formula="of:=[.Q118]" office:value-type="float" office:value="11200000" calcext:value-type="float">
            <text:p>11200000.0</text:p>
          </table:table-cell>
          <table:table-cell table:style-name="ce67" table:formula="of:=[.R118]" office:value-type="float" office:value="11200000" calcext:value-type="float">
            <text:p>11200000.0</text:p>
          </table:table-cell>
          <table:table-cell table:style-name="ce67" table:formula="of:=[.S118]" office:value-type="float" office:value="14560000" calcext:value-type="float">
            <text:p>14560000.0</text:p>
          </table:table-cell>
          <table:table-cell table:style-name="ce67" table:formula="of:=[.T118]" office:value-type="float" office:value="14560000" calcext:value-type="float">
            <text:p>14560000.0</text:p>
          </table:table-cell>
          <table:table-cell table:style-name="ce67" table:formula="of:=[.U118]" office:value-type="float" office:value="17908800" calcext:value-type="float">
            <text:p>17908800.0</text:p>
          </table:table-cell>
          <table:table-cell table:style-name="ce67" table:formula="of:=[.V118]" office:value-type="float" office:value="17908800" calcext:value-type="float">
            <text:p>17908800.0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Pago de IGV</text:p>
          </table:table-cell>
          <table:table-cell table:style-name="ce16"/>
          <table:table-cell table:style-name="ce67" table:formula="of:=[.N137]" office:value-type="float" office:value="0" calcext:value-type="float">
            <text:p>0.0</text:p>
          </table:table-cell>
          <table:table-cell table:style-name="ce67" table:formula="of:=[.O137]" office:value-type="float" office:value="-24030" calcext:value-type="float">
            <text:p>-24030.0</text:p>
          </table:table-cell>
          <table:table-cell table:style-name="ce67" table:formula="of:=[.P137]" office:value-type="float" office:value="-812664" calcext:value-type="float">
            <text:p>-812664.0</text:p>
          </table:table-cell>
          <table:table-cell table:style-name="ce67" table:formula="of:=[.Q137]" office:value-type="float" office:value="-812664" calcext:value-type="float">
            <text:p>-812664.0</text:p>
          </table:table-cell>
          <table:table-cell table:style-name="ce67" table:formula="of:=[.R137]" office:value-type="float" office:value="-812664" calcext:value-type="float">
            <text:p>-812664.0</text:p>
          </table:table-cell>
          <table:table-cell table:style-name="ce67" table:formula="of:=[.S137]" office:value-type="float" office:value="-1075903.2" calcext:value-type="float">
            <text:p>-1075903.2</text:p>
          </table:table-cell>
          <table:table-cell table:style-name="ce67" table:formula="of:=[.T137]" office:value-type="float" office:value="-931903.2" calcext:value-type="float">
            <text:p>-931903.2</text:p>
          </table:table-cell>
          <table:table-cell table:style-name="ce67" table:formula="of:=[.U137]" office:value-type="float" office:value="-1338264.936" calcext:value-type="float">
            <text:p>-1338264.9</text:p>
          </table:table-cell>
          <table:table-cell table:style-name="ce67" table:formula="of:=[.V137]" office:value-type="float" office:value="-1338264.936" calcext:value-type="float">
            <text:p>-1338264.9</text:p>
          </table:table-cell>
          <table:table-cell/>
          <table:table-cell table:style-name="ce3" office:value-type="string" calcext:value-type="string">
            <text:p>IGV Recibido</text:p>
          </table:table-cell>
          <table:table-cell table:style-name="ce67"/>
          <table:table-cell table:style-name="ce67" table:formula="of:=[.O131]*0.18" office:value-type="float" office:value="2520000" calcext:value-type="float">
            <text:p>2520000.0</text:p>
          </table:table-cell>
          <table:table-cell table:style-name="ce67" table:formula="of:=[.P131]*0.18" office:value-type="float" office:value="2016000" calcext:value-type="float">
            <text:p>2016000.0</text:p>
          </table:table-cell>
          <table:table-cell table:style-name="ce67" table:formula="of:=[.Q131]*0.18" office:value-type="float" office:value="2016000" calcext:value-type="float">
            <text:p>2016000.0</text:p>
          </table:table-cell>
          <table:table-cell table:style-name="ce67" table:formula="of:=[.R131]*0.18" office:value-type="float" office:value="2016000" calcext:value-type="float">
            <text:p>2016000.0</text:p>
          </table:table-cell>
          <table:table-cell table:style-name="ce67" table:formula="of:=[.S131]*0.18" office:value-type="float" office:value="2620800" calcext:value-type="float">
            <text:p>2620800.0</text:p>
          </table:table-cell>
          <table:table-cell table:style-name="ce67" table:formula="of:=[.T131]*0.18" office:value-type="float" office:value="2620800" calcext:value-type="float">
            <text:p>2620800.0</text:p>
          </table:table-cell>
          <table:table-cell table:style-name="ce67" table:formula="of:=[.U131]*0.18" office:value-type="float" office:value="3223584" calcext:value-type="float">
            <text:p>3223584.0</text:p>
          </table:table-cell>
          <table:table-cell table:style-name="ce67" table:formula="of:=[.V131]*0.18" office:value-type="float" office:value="3223584" calcext:value-type="float">
            <text:p>3223584.0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Deprecición Infraestructura</text:p>
          </table:table-cell>
          <table:table-cell table:style-name="ce16" table:formula="of:=[.N138]" office:value-type="float" office:value="0" calcext:value-type="float">
            <text:p>0</text:p>
          </table:table-cell>
          <table:table-cell table:style-name="ce67"/>
          <table:table-cell table:style-name="ce67" table:formula="of:=(-1)*[.D117]" office:value-type="float" office:value="175000" calcext:value-type="float">
            <text:p>175000.0</text:p>
          </table:table-cell>
          <table:table-cell table:style-name="ce67" table:formula="of:=(-1)*[.E117]" office:value-type="float" office:value="175000" calcext:value-type="float">
            <text:p>175000.0</text:p>
          </table:table-cell>
          <table:table-cell table:style-name="ce67" table:formula="of:=(-1)*[.F117]" office:value-type="float" office:value="175000" calcext:value-type="float">
            <text:p>175000.0</text:p>
          </table:table-cell>
          <table:table-cell table:style-name="ce67" table:formula="of:=(-1)*[.G117]" office:value-type="float" office:value="175000" calcext:value-type="float">
            <text:p>175000.0</text:p>
          </table:table-cell>
          <table:table-cell table:style-name="ce67" table:formula="of:=(-1)*[.H117]" office:value-type="float" office:value="175000" calcext:value-type="float">
            <text:p>175000.0</text:p>
          </table:table-cell>
          <table:table-cell table:style-name="ce67" table:formula="of:=(-1)*[.I117]" office:value-type="float" office:value="175000" calcext:value-type="float">
            <text:p>175000.0</text:p>
          </table:table-cell>
          <table:table-cell table:style-name="ce67" table:formula="of:=(-1)*[.J117]" office:value-type="float" office:value="175000" calcext:value-type="float">
            <text:p>175000.0</text:p>
          </table:table-cell>
          <table:table-cell table:style-name="ce116" table:formula="of:=(-1)*[.K117]" office:value-type="float" office:value="175000" calcext:value-type="float">
            <text:p>175000.0</text:p>
          </table:table-cell>
          <table:table-cell/>
          <table:table-cell table:style-name="ce3" office:value-type="string" calcext:value-type="string">
            <office:annotation draw:style-name="gr5" draw:text-style-name="P1" svg:width="3.823cm" svg:height="1.957cm" svg:x="40.424cm" svg:y="59.214cm" draw:caption-point-x="1.989cm" draw:caption-point-y="0.169cm">
              <dc:creator>Edison Achalma Mendoza</dc:creator>
              <dc:date>2024-07-31T03:29:00</dc:date>
              <text:p>Edison:</text:p>
              <text:p><text:span text:style-name="T1">Todas la compras inmersas con IGV</text:span></text:p>
            </office:annotation>
            <text:p>Compras</text:p>
          </table:table-cell>
          <table:table-cell table:style-name="ce67" table:formula="of:=-[.F60]" office:value-type="float" office:value="-5600000" calcext:value-type="float">
            <text:p>-5600000.0</text:p>
          </table:table-cell>
          <table:table-cell table:style-name="ce67" table:formula="of:=[.O119]+[.O121]" office:value-type="float" office:value="-8266500" calcext:value-type="float">
            <text:p>-8266500.0</text:p>
          </table:table-cell>
          <table:table-cell table:style-name="ce67" table:formula="of:=[.P119]+[.P121]" office:value-type="float" office:value="-6685200" calcext:value-type="float">
            <text:p>-6685200.0</text:p>
          </table:table-cell>
          <table:table-cell table:style-name="ce67" table:formula="of:=[.Q119]+[.Q121]" office:value-type="float" office:value="-6685200" calcext:value-type="float">
            <text:p>-6685200.0</text:p>
          </table:table-cell>
          <table:table-cell table:style-name="ce67" table:formula="of:=[.R119]+[.R121]" office:value-type="float" office:value="-6685200" calcext:value-type="float">
            <text:p>-6685200.0</text:p>
          </table:table-cell>
          <table:table-cell table:style-name="ce67" table:formula="of:=[.S119]+[.S121]" office:value-type="float" office:value="-8582760" calcext:value-type="float">
            <text:p>-8582760.0</text:p>
          </table:table-cell>
          <table:table-cell table:style-name="ce67" table:formula="of:=[.T119]+[.T121]+[.T112]" office:value-type="float" office:value="-9382760" calcext:value-type="float">
            <text:p>-9382760.0</text:p>
          </table:table-cell>
          <table:table-cell table:style-name="ce67" table:formula="of:=[.U119]+[.U121]" office:value-type="float" office:value="-10473994.8" calcext:value-type="float">
            <text:p>-10473994.8</text:p>
          </table:table-cell>
          <table:table-cell table:style-name="ce67" table:formula="of:=[.V119]+[.V121]" office:value-type="float" office:value="-10473994.8" calcext:value-type="float">
            <text:p>-10473994.8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Deprec. Línea Antigua</text:p>
          </table:table-cell>
          <table:table-cell table:style-name="ce16" table:formula="of:=[.N139]" office:value-type="float" office:value="0" calcext:value-type="float">
            <text:p>0</text:p>
          </table:table-cell>
          <table:table-cell table:style-name="ce67"/>
          <table:table-cell table:style-name="ce67" table:formula="of:=(-1)*[.D118]" office:value-type="float" office:value="160000" calcext:value-type="float">
            <text:p>160000.0</text:p>
          </table:table-cell>
          <table:table-cell table:style-name="ce67" table:formula="of:=(-1)*[.E118]" office:value-type="float" office:value="160000" calcext:value-type="float">
            <text:p>160000.0</text:p>
          </table:table-cell>
          <table:table-cell table:style-name="ce67" table:formula="of:=(-1)*[.F118]" office:value-type="float" office:value="160000" calcext:value-type="float">
            <text:p>160000.0</text:p>
          </table:table-cell>
          <table:table-cell table:style-name="ce67" table:formula="of:=(-1)*[.G118]" office:value-type="float" office:value="160000" calcext:value-type="float">
            <text:p>160000.0</text:p>
          </table:table-cell>
          <table:table-cell table:style-name="ce67" table:formula="of:=(-1)*[.H118]" office:value-type="float" office:value="160000" calcext:value-type="float">
            <text:p>160000.0</text:p>
          </table:table-cell>
          <table:table-cell table:style-name="ce67" table:formula="of:=(-1)*[.I118]" office:value-type="float" office:value="160000" calcext:value-type="float">
            <text:p>160000.0</text:p>
          </table:table-cell>
          <table:table-cell table:style-name="ce67" table:formula="of:=(-1)*[.J118]" office:value-type="float" office:value="160000" calcext:value-type="float">
            <text:p>160000.0</text:p>
          </table:table-cell>
          <table:table-cell table:style-name="ce116" table:formula="of:=(-1)*[.K118]" office:value-type="float" office:value="160000" calcext:value-type="float">
            <text:p>160000.0</text:p>
          </table:table-cell>
          <table:table-cell/>
          <table:table-cell table:style-name="ce3" office:value-type="string" calcext:value-type="string">
            <text:p>IGV Pagado</text:p>
          </table:table-cell>
          <table:table-cell table:style-name="ce67"/>
          <table:table-cell table:style-name="ce67" table:formula="of:=-[.O133]*0.18" office:value-type="float" office:value="1487970" calcext:value-type="float">
            <text:p>1487970.0</text:p>
          </table:table-cell>
          <table:table-cell table:style-name="ce67" table:formula="of:=-[.P133]*0.18" office:value-type="float" office:value="1203336" calcext:value-type="float">
            <text:p>1203336.0</text:p>
          </table:table-cell>
          <table:table-cell table:style-name="ce67" table:formula="of:=-[.Q133]*0.18" office:value-type="float" office:value="1203336" calcext:value-type="float">
            <text:p>1203336.0</text:p>
          </table:table-cell>
          <table:table-cell table:style-name="ce67" table:formula="of:=-[.R133]*0.18" office:value-type="float" office:value="1203336" calcext:value-type="float">
            <text:p>1203336.0</text:p>
          </table:table-cell>
          <table:table-cell table:style-name="ce67" table:formula="of:=-[.S133]*0.18" office:value-type="float" office:value="1544896.8" calcext:value-type="float">
            <text:p>1544896.8</text:p>
          </table:table-cell>
          <table:table-cell table:style-name="ce67" table:formula="of:=-[.T133]*0.18" office:value-type="float" office:value="1688896.8" calcext:value-type="float">
            <text:p>1688896.8</text:p>
          </table:table-cell>
          <table:table-cell table:style-name="ce67" table:formula="of:=-[.U133]*0.18" office:value-type="float" office:value="1885319.064" calcext:value-type="float">
            <text:p>1885319.1</text:p>
          </table:table-cell>
          <table:table-cell table:style-name="ce67" table:formula="of:=-[.V133]*0.18" office:value-type="float" office:value="1885319.064" calcext:value-type="float">
            <text:p>1885319.1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Deprec. Línea Nueva</text:p>
          </table:table-cell>
          <table:table-cell table:style-name="ce16" table:formula="of:=[.N140]" office:value-type="float" office:value="0" calcext:value-type="float">
            <text:p>0</text:p>
          </table:table-cell>
          <table:table-cell table:style-name="ce67" table:number-columns-repeated="7"/>
          <table:table-cell table:style-name="ce67" table:formula="of:=(-1)*[.J119]" office:value-type="float" office:value="80000" calcext:value-type="float">
            <text:p>80000.0</text:p>
          </table:table-cell>
          <table:table-cell table:style-name="ce116" table:formula="of:=(-1)*[.K119]" office:value-type="float" office:value="80000" calcext:value-type="float">
            <text:p>80000.0</text:p>
          </table:table-cell>
          <table:table-cell/>
          <table:table-cell table:style-name="ce3" office:value-type="string" calcext:value-type="string">
            <text:p>IGV a pagar</text:p>
          </table:table-cell>
          <table:table-cell table:style-name="ce132"/>
          <table:table-cell table:style-name="ce132" table:formula="of:=-([.O132]-[.O134])" office:value-type="float" office:value="-1032030" calcext:value-type="float">
            <text:p>-1032030.0</text:p>
          </table:table-cell>
          <table:table-cell table:style-name="ce132" table:formula="of:=-([.P132]-[.P134])" office:value-type="float" office:value="-812664" calcext:value-type="float">
            <text:p>-812664.0</text:p>
          </table:table-cell>
          <table:table-cell table:style-name="ce132" table:formula="of:=-([.Q132]-[.Q134])" office:value-type="float" office:value="-812664" calcext:value-type="float">
            <text:p>-812664.0</text:p>
          </table:table-cell>
          <table:table-cell table:style-name="ce132" table:formula="of:=-([.R132]-[.R134])" office:value-type="float" office:value="-812664" calcext:value-type="float">
            <text:p>-812664.0</text:p>
          </table:table-cell>
          <table:table-cell table:style-name="ce132" table:formula="of:=-([.S132]-[.S134])" office:value-type="float" office:value="-1075903.2" calcext:value-type="float">
            <text:p>-1075903.2</text:p>
          </table:table-cell>
          <table:table-cell table:style-name="ce132" table:formula="of:=-([.T132]-[.T134])" office:value-type="float" office:value="-931903.2" calcext:value-type="float">
            <text:p>-931903.2</text:p>
          </table:table-cell>
          <table:table-cell table:style-name="ce132" table:formula="of:=-([.U132]-[.U134])" office:value-type="float" office:value="-1338264.936" calcext:value-type="float">
            <text:p>-1338264.9</text:p>
          </table:table-cell>
          <table:table-cell table:style-name="ce132" table:formula="of:=-([.V132]-[.V134])" office:value-type="float" office:value="-1338264.936" calcext:value-type="float">
            <text:p>-1338264.9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Flujo Operativo</text:p>
          </table:table-cell>
          <table:table-cell table:style-name="ce16" table:formula="of:=[.N141]" office:value-type="float" office:value="0" calcext:value-type="float">
            <text:p>0</text:p>
          </table:table-cell>
          <table:table-cell table:style-name="ce68" table:formula="of:=SUM([.C131:.C135])" office:value-type="float" office:value="0" calcext:value-type="float">
            <text:p>0.0</text:p>
          </table:table-cell>
          <table:table-cell table:style-name="ce68" table:formula="of:=SUM([.D131:.D135])" office:value-type="float" office:value="3331785.725" calcext:value-type="float">
            <text:p>3331785.7</text:p>
          </table:table-cell>
          <table:table-cell table:style-name="ce68" table:formula="of:=SUM([.E131:.E135])" office:value-type="float" office:value="1782668.225" calcext:value-type="float">
            <text:p>1782668.2</text:p>
          </table:table-cell>
          <table:table-cell table:style-name="ce68" table:formula="of:=SUM([.F131:.F135])" office:value-type="float" office:value="1782668.225" calcext:value-type="float">
            <text:p>1782668.2</text:p>
          </table:table-cell>
          <table:table-cell table:style-name="ce68" table:formula="of:=SUM([.G131:.G135])" office:value-type="float" office:value="1940588.225" calcext:value-type="float">
            <text:p>1940588.2</text:p>
          </table:table-cell>
          <table:table-cell table:style-name="ce68" table:formula="of:=SUM([.H131:.H135])" office:value-type="float" office:value="2637305.225" calcext:value-type="float">
            <text:p>2637305.2</text:p>
          </table:table-cell>
          <table:table-cell table:style-name="ce68" table:formula="of:=SUM([.I131:.I135])" office:value-type="float" office:value="2781305.225" calcext:value-type="float">
            <text:p>2781305.2</text:p>
          </table:table-cell>
          <table:table-cell table:style-name="ce68" table:formula="of:=SUM([.J131:.J135])" office:value-type="float" office:value="3355299.835" calcext:value-type="float">
            <text:p>3355299.8</text:p>
          </table:table-cell>
          <table:table-cell table:style-name="ce68" table:formula="of:=SUM([.K131:.K135])" office:value-type="float" office:value="2653824.835" calcext:value-type="float">
            <text:p>2653824.8</text:p>
          </table:table-cell>
          <table:table-cell/>
          <table:table-cell table:style-name="ce126" office:value-type="string" calcext:value-type="string">
            <text:p>Crédito Fiscail</text:p>
          </table:table-cell>
          <table:table-cell table:style-name="ce133" table:formula="of:=-[.N133]*0.18" office:value-type="float" office:value="1008000" calcext:value-type="float">
            <text:p>1008000.0</text:p>
          </table:table-cell>
          <table:table-cell table:style-name="ce136" office:value-type="string" calcext:value-type="string">
            <text:p>-</text:p>
          </table:table-cell>
          <table:table-cell table:number-columns-repeated="7" table:style-name="ce133" office:value-type="float" office:value="0" calcext:value-type="float">
            <text:p>0.0</text:p>
          </table:table-cell>
          <table:table-cell table:number-columns-repeated="16362"/>
        </table:table-row>
        <table:table-row table:style-name="ro1">
          <table:table-cell table:style-name="ce28" office:value-type="string" calcext:value-type="string">
            <text:p>Inversión Infraestructura</text:p>
          </table:table-cell>
          <table:table-cell table:style-name="ce47" table:formula="of:=[.N142]" office:value-type="float" office:value="0" calcext:value-type="float">
            <text:p>0</text:p>
          </table:table-cell>
          <table:table-cell table:style-name="ce69" table:formula="of:=[.E58]*(-1)" office:value-type="float" office:value="-3500000" calcext:value-type="float">
            <text:p>-3500000.0</text:p>
          </table:table-cell>
          <table:table-cell table:style-name="ce70" table:number-columns-repeated="7"/>
          <table:table-cell table:style-name="ce118"/>
          <table:table-cell/>
          <table:table-cell table:style-name="ce127" office:value-type="string" calcext:value-type="string">
            <text:p>IGV Neto a pagar</text:p>
          </table:table-cell>
          <table:table-cell table:style-name="ce131" office:value-type="float" office:value="0" calcext:value-type="float">
            <text:p>0.0</text:p>
          </table:table-cell>
          <table:table-cell table:style-name="ce131" table:formula="of:=[.N136]+[.O135]" office:value-type="float" office:value="-24030" calcext:value-type="float">
            <text:p>-24030.0</text:p>
          </table:table-cell>
          <table:table-cell table:style-name="ce131" table:formula="of:=[.P135]" office:value-type="float" office:value="-812664" calcext:value-type="float">
            <text:p>-812664.0</text:p>
          </table:table-cell>
          <table:table-cell table:style-name="ce131" table:formula="of:=[.Q135]" office:value-type="float" office:value="-812664" calcext:value-type="float">
            <text:p>-812664.0</text:p>
          </table:table-cell>
          <table:table-cell table:style-name="ce131" table:formula="of:=[.R135]" office:value-type="float" office:value="-812664" calcext:value-type="float">
            <text:p>-812664.0</text:p>
          </table:table-cell>
          <table:table-cell table:style-name="ce131" table:formula="of:=[.S135]" office:value-type="float" office:value="-1075903.2" calcext:value-type="float">
            <text:p>-1075903.2</text:p>
          </table:table-cell>
          <table:table-cell table:style-name="ce131" table:formula="of:=[.T135]" office:value-type="float" office:value="-931903.2" calcext:value-type="float">
            <text:p>-931903.2</text:p>
          </table:table-cell>
          <table:table-cell table:style-name="ce131" table:formula="of:=[.U135]" office:value-type="float" office:value="-1338264.936" calcext:value-type="float">
            <text:p>-1338264.9</text:p>
          </table:table-cell>
          <table:table-cell table:style-name="ce131" table:formula="of:=[.V135]" office:value-type="float" office:value="-1338264.936" calcext:value-type="float">
            <text:p>-1338264.9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Inversión en terreno</text:p>
          </table:table-cell>
          <table:table-cell table:style-name="ce47" table:formula="of:=[.N143]" office:value-type="float" office:value="0" calcext:value-type="float">
            <text:p>0</text:p>
          </table:table-cell>
          <table:table-cell table:style-name="ce70" table:formula="of:=[.E60]*(-1)" office:value-type="float" office:value="-500000" calcext:value-type="float">
            <text:p>-500000.0</text:p>
          </table:table-cell>
          <table:table-cell table:style-name="ce70" table:number-columns-repeated="7"/>
          <table:table-cell table:style-name="ce118"/>
          <table:table-cell/>
          <table:table-cell table:style-name="ce128" table:number-columns-repeated="6"/>
          <table:table-cell table:number-columns-repeated="16366"/>
        </table:table-row>
        <table:table-row table:style-name="ro1">
          <table:table-cell table:style-name="ce29" office:value-type="string" calcext:value-type="string">
            <text:p>Inversión en líneas de prod.</text:p>
          </table:table-cell>
          <table:table-cell table:style-name="ce47" table:formula="of:=[.N144]" office:value-type="float" office:value="0" calcext:value-type="float">
            <text:p>0</text:p>
          </table:table-cell>
          <table:table-cell table:style-name="ce70" table:formula="of:=[.E59]*(-1)" office:value-type="float" office:value="-1600000" calcext:value-type="float">
            <text:p>-1600000.0</text:p>
          </table:table-cell>
          <table:table-cell table:style-name="ce70" table:number-columns-repeated="5"/>
          <table:table-cell table:style-name="ce69" table:formula="of:=800000*(-1)" office:value-type="float" office:value="-800000" calcext:value-type="float">
            <text:p>-800000.0</text:p>
          </table:table-cell>
          <table:table-cell table:style-name="ce70"/>
          <table:table-cell table:style-name="ce118"/>
          <table:table-cell/>
          <table:table-cell table:style-name="ce129" table:number-columns-repeated="6"/>
          <table:table-cell table:number-columns-repeated="16366"/>
        </table:table-row>
        <table:table-row table:style-name="ro1">
          <table:table-cell table:style-name="ce29" office:value-type="string" calcext:value-type="string">
            <text:p>Inversión en capital de trab.</text:p>
          </table:table-cell>
          <table:table-cell table:style-name="ce47" table:formula="of:=[.N145]" office:value-type="float" office:value="0" calcext:value-type="float">
            <text:p>0</text:p>
          </table:table-cell>
          <table:table-cell table:style-name="ce70" table:formula="of:=[.C81]" office:value-type="float" office:value="-1976625" calcext:value-type="float">
            <text:p>-1976625.0</text:p>
          </table:table-cell>
          <table:table-cell table:style-name="ce70" table:formula="of:=[.C82]" office:value-type="float" office:value="395325" calcext:value-type="float">
            <text:p>395325.0</text:p>
          </table:table-cell>
          <table:table-cell table:style-name="ce70" table:number-columns-repeated="2"/>
          <table:table-cell table:style-name="ce70" table:formula="of:=[.C85]" office:value-type="float" office:value="-474390" calcext:value-type="float">
            <text:p>-474390.0</text:p>
          </table:table-cell>
          <table:table-cell table:style-name="ce70"/>
          <table:table-cell table:style-name="ce70" table:formula="of:=[.C87]" office:value-type="float" office:value="-472808.7" calcext:value-type="float">
            <text:p>-472808.7</text:p>
          </table:table-cell>
          <table:table-cell table:style-name="ce70"/>
          <table:table-cell table:style-name="ce118"/>
          <table:table-cell/>
          <table:table-cell table:style-name="ce129" table:number-columns-repeated="6"/>
          <table:table-cell table:number-columns-repeated="16366"/>
        </table:table-row>
        <table:table-row table:style-name="ro1">
          <table:table-cell table:style-name="ce25" office:value-type="string" calcext:value-type="string">
            <text:p>Valor en libro Infraestructura*</text:p>
          </table:table-cell>
          <table:table-cell table:style-name="ce16" table:formula="of:=[.N146]" office:value-type="float" office:value="0" calcext:value-type="float">
            <text:p>0</text:p>
          </table:table-cell>
          <table:table-cell table:style-name="ce67" table:number-columns-repeated="8"/>
          <table:table-cell table:style-name="ce116" table:formula="of:=[.K122]*(-1)" office:value-type="float" office:value="2100000" calcext:value-type="float">
            <text:p>2100000.0</text:p>
          </table:table-cell>
          <table:table-cell/>
          <table:table-cell table:style-name="ce129" table:number-columns-repeated="6"/>
          <table:table-cell table:number-columns-repeated="16366"/>
        </table:table-row>
        <table:table-row table:style-name="ro1">
          <table:table-cell table:style-name="ce25" office:value-type="string" calcext:value-type="string">
            <text:p>Valor en libro Linea Antigua</text:p>
          </table:table-cell>
          <table:table-cell table:style-name="ce16" table:formula="of:=[.N147]" office:value-type="float" office:value="0" calcext:value-type="float">
            <text:p>0</text:p>
          </table:table-cell>
          <table:table-cell table:style-name="ce67" table:number-columns-repeated="8"/>
          <table:table-cell table:style-name="ce116" table:formula="of:=[.K124]*(-1)" office:value-type="float" office:value="320000" calcext:value-type="float">
            <text:p>320000.0</text:p>
          </table:table-cell>
          <table:table-cell/>
          <table:table-cell table:style-name="ce129" table:number-columns-repeated="6"/>
          <table:table-cell table:number-columns-repeated="16366"/>
        </table:table-row>
        <table:table-row table:style-name="ro1">
          <table:table-cell table:style-name="ce26" office:value-type="string" calcext:value-type="string">
            <text:p>Valor en libro Linea Nueva</text:p>
          </table:table-cell>
          <table:table-cell table:style-name="ce16" table:formula="of:=[.N148]" office:value-type="float" office:value="0" calcext:value-type="float">
            <text:p>0</text:p>
          </table:table-cell>
          <table:table-cell table:style-name="ce67" table:number-columns-repeated="8"/>
          <table:table-cell table:style-name="ce116" table:formula="of:=[.K126]*(-1)" office:value-type="float" office:value="640000" calcext:value-type="float">
            <text:p>640000.0</text:p>
          </table:table-cell>
          <table:table-cell/>
          <table:table-cell table:style-name="ce130"/>
          <table:table-cell table:style-name="ce134" table:number-columns-repeated="5"/>
          <table:table-cell table:number-columns-repeated="16366"/>
        </table:table-row>
        <table:table-row table:style-name="ro1">
          <table:table-cell table:style-name="ce29" office:value-type="string" calcext:value-type="string">
            <text:p>Valor en libro terreno</text:p>
          </table:table-cell>
          <table:table-cell table:style-name="ce47" table:formula="of:=[.N149]" office:value-type="float" office:value="0" calcext:value-type="float">
            <text:p>0</text:p>
          </table:table-cell>
          <table:table-cell table:style-name="ce70" table:number-columns-repeated="8"/>
          <table:table-cell table:style-name="ce118" table:formula="of:=[.K127]*(-1)" office:value-type="float" office:value="500000" calcext:value-type="float">
            <text:p>500000.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Recupero capital de trabajo</text:p>
          </table:table-cell>
          <table:table-cell table:style-name="ce47" table:formula="of:=[.N150]" office:value-type="float" office:value="0" calcext:value-type="float">
            <text:p>0</text:p>
          </table:table-cell>
          <table:table-cell table:style-name="ce70" table:number-columns-repeated="8"/>
          <table:table-cell table:style-name="ce118" table:formula="of:=SUM([.C140:.K140])*(-1)" office:value-type="float" office:value="2528498.7" calcext:value-type="float">
            <text:p>2528498.7</text:p>
          </table:table-cell>
          <table:table-cell table:number-columns-repeated="16373"/>
        </table:table-row>
        <table:table-row table:style-name="ro1">
          <table:table-cell table:style-name="ce27" office:value-type="string" calcext:value-type="string">
            <text:p>Flujo de Inversión y Liq.</text:p>
          </table:table-cell>
          <table:table-cell table:style-name="ce16" table:formula="of:=[.N151]" office:value-type="float" office:value="0" calcext:value-type="float">
            <text:p>0</text:p>
          </table:table-cell>
          <table:table-cell table:style-name="ce68" table:formula="of:=SUM([.C137:.C145])" office:value-type="float" office:value="-7576625" calcext:value-type="float">
            <text:p>-7576625.0</text:p>
          </table:table-cell>
          <table:table-cell table:style-name="ce68" table:formula="of:=SUM([.D137:.D145])" office:value-type="float" office:value="395325" calcext:value-type="float">
            <text:p>395325.0</text:p>
          </table:table-cell>
          <table:table-cell table:style-name="ce68" table:formula="of:=SUM([.E137:.E145])" office:value-type="float" office:value="0" calcext:value-type="float">
            <text:p>0.0</text:p>
          </table:table-cell>
          <table:table-cell table:style-name="ce68" table:formula="of:=SUM([.F137:.F145])" office:value-type="float" office:value="0" calcext:value-type="float">
            <text:p>0.0</text:p>
          </table:table-cell>
          <table:table-cell table:style-name="ce68" table:formula="of:=SUM([.G137:.G145])" office:value-type="float" office:value="-474390" calcext:value-type="float">
            <text:p>-474390.0</text:p>
          </table:table-cell>
          <table:table-cell table:style-name="ce68" table:formula="of:=SUM([.H137:.H145])" office:value-type="float" office:value="0" calcext:value-type="float">
            <text:p>0.0</text:p>
          </table:table-cell>
          <table:table-cell table:style-name="ce68" table:formula="of:=SUM([.I137:.I145])" office:value-type="float" office:value="-1272808.7" calcext:value-type="float">
            <text:p>-1272808.7</text:p>
          </table:table-cell>
          <table:table-cell table:style-name="ce68" table:formula="of:=SUM([.J137:.J145])" office:value-type="float" office:value="0" calcext:value-type="float">
            <text:p>0.0</text:p>
          </table:table-cell>
          <table:table-cell table:style-name="ce68" table:formula="of:=SUM([.K137:.K145])" office:value-type="float" office:value="6088498.7" calcext:value-type="float">
            <text:p>6088498.7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Flujo Caja Económico</text:p>
          </table:table-cell>
          <table:table-cell table:style-name="ce16" table:formula="of:=[.N152]" office:value-type="float" office:value="0" calcext:value-type="float">
            <text:p>0</text:p>
          </table:table-cell>
          <table:table-cell table:style-name="ce71" table:formula="of:=[.C136]+[.C146]" office:value-type="float" office:value="-7576625" calcext:value-type="float">
            <text:p>-7576625.0</text:p>
          </table:table-cell>
          <table:table-cell table:style-name="ce71" table:formula="of:=[.D136]+[.D146]" office:value-type="float" office:value="3727110.725" calcext:value-type="float">
            <text:p>3727110.7</text:p>
          </table:table-cell>
          <table:table-cell table:style-name="ce71" table:formula="of:=[.E136]+[.E146]" office:value-type="float" office:value="1782668.225" calcext:value-type="float">
            <text:p>1782668.2</text:p>
          </table:table-cell>
          <table:table-cell table:style-name="ce71" table:formula="of:=[.F136]+[.F146]" office:value-type="float" office:value="1782668.225" calcext:value-type="float">
            <text:p>1782668.2</text:p>
          </table:table-cell>
          <table:table-cell table:style-name="ce71" table:formula="of:=[.G136]+[.G146]" office:value-type="float" office:value="1466198.225" calcext:value-type="float">
            <text:p>1466198.2</text:p>
          </table:table-cell>
          <table:table-cell table:style-name="ce71" table:formula="of:=[.H136]+[.H146]" office:value-type="float" office:value="2637305.225" calcext:value-type="float">
            <text:p>2637305.2</text:p>
          </table:table-cell>
          <table:table-cell table:style-name="ce71" table:formula="of:=[.I136]+[.I146]" office:value-type="float" office:value="1508496.525" calcext:value-type="float">
            <text:p>1508496.5</text:p>
          </table:table-cell>
          <table:table-cell table:style-name="ce71" table:formula="of:=[.J136]+[.J146]" office:value-type="float" office:value="3355299.835" calcext:value-type="float">
            <text:p>3355299.8</text:p>
          </table:table-cell>
          <table:table-cell table:style-name="ce71" table:formula="of:=[.K136]+[.K146]" office:value-type="float" office:value="8742323.535" calcext:value-type="float">
            <text:p>8742323.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office:annotation draw:style-name="gr5" draw:text-style-name="P1" svg:width="3.799cm" svg:height="1.957cm" svg:x="4.841cm" svg:y="66.41cm" draw:caption-point-x="1.806cm" draw:caption-point-y="0.169cm">
              <dc:creator>Edison Achalma Mendoza</dc:creator>
              <dc:date>2024-07-31T03:29:00</dc:date>
              <text:p>Edison:</text:p>
              <text:p><text:span text:style-name="T1">COSTO DE OPORTUNIDAD DE CAPITAL</text:span></text:p>
            </office:annotation>
            <text:p>COK = Ku = <text:s/></text:p>
          </table:table-cell>
          <table:table-cell table:style-name="ce48" office:value-type="percentage" office:value="0.15" calcext:value-type="percentage">
            <office:annotation draw:style-name="gr8" draw:text-style-name="P1" svg:width="6.088cm" svg:height="3.597cm" svg:x="9.906cm" svg:y="66.304cm" draw:caption-point-x="-0.407cm" draw:caption-point-y="0.275cm">
              <dc:creator>Edison Achalma Mendoza</dc:creator>
              <dc:date>2024-07-31T03:29:00</dc:date>
              <text:p>Edison:</text:p>
              <text:p><text:span text:style-name="T1">La rentabilidad mínima exgina por los inversionistas, acionistas de esta empres en termino reales es 15%</text:span></text:p>
            </office:annotation>
            <text:p>15 %</text:p>
          </table:table-cell>
          <table:table-cell table:style-name="ce12" office:value-type="string" calcext:value-type="string">
            <text:p>Tasa real, por el fjujo de caja esta proyectado en términos reales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VAN =</text:p>
          </table:table-cell>
          <table:table-cell table:style-name="ce49" table:formula="of:=NPV([.B149];[.D147:.K147])+[.C147]" office:value-type="float" office:value="5105365.0628535" calcext:value-type="float">
            <office:annotation draw:style-name="gr9" draw:text-style-name="P1" svg:width="11.729cm" svg:height="4.391cm" svg:x="9.906cm" svg:y="66.755cm" draw:caption-point-x="-0.407cm" draw:caption-point-y="0.274cm">
              <dc:creator>Edison Achalma Mendoza</dc:creator>
              <dc:date>2024-07-31T03:29:00</dc:date>
              <text:p>Edison:</text:p>
              <text:p><text:span text:style-name="T1">Si tengo yo como inversionista un costo de oportunidad de invertir el 100% de mi patrimonio en este proyecto en terminos reales 15%) yo con este proyecto tendria ahora un valor 5105.365 mas o de valor <text:s/>agragado depues de haber cubierto la inversion de 7576.625 millones o despues de haber cubierto mi costo de oportunidad de la rentabilidad minima exigida de 15%. Con este proyecto se estaria creando valor de esta empresa.</text:span></text:p>
            </office:annotation>
            <text:p>5105365.06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TIR=</text:p>
          </table:table-cell>
          <table:table-cell table:style-name="ce50" table:formula="of:=IRR([.C147:.K147])" office:value-type="percentage" office:value="0.314820736492127" calcext:value-type="percentage">
            <office:annotation draw:style-name="gr10" draw:text-style-name="P1" svg:width="10.104cm" svg:height="3.598cm" svg:x="7.9cm" svg:y="67.31cm" draw:caption-point-x="1.599cm" draw:caption-point-y="0.169cm">
              <dc:creator>Edison Achalma Mendoza</dc:creator>
              <dc:date>2024-07-31T03:29:00</dc:date>
              <text:p>Edison:</text:p>
              <text:p><text:span text:style-name="T1">Mi rentabilidad promedio es 31,48%. Ademas es mayor a mi costo de oportunidad, entonces el proyecto va bien.</text:span></text:p>
            </office:annotation>
            <text:p>31.48 %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3" office:value-type="string" calcext:value-type="string">
            <text:p>*El valor en libro es el valor de recupero</text:p>
          </table:table-cell>
          <table:table-cell table:number-columns-repeated="16383"/>
        </table:table-row>
        <table:table-row table:style-name="ro1" table:number-rows-repeated="10484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UDA" table:style-name="ta4">
        <table:table-column table:style-name="co1" table:default-cell-style-name="Default"/>
        <table:table-column table:style-name="co28" table:default-cell-style-name="Default"/>
        <table:table-column table:style-name="co1" table:default-cell-style-name="ce38"/>
        <table:table-column table:style-name="co23" table:default-cell-style-name="ce143"/>
        <table:table-column table:style-name="co29" table:default-cell-style-name="ce150"/>
        <table:table-column table:style-name="co30" table:default-cell-style-name="ce151"/>
        <table:table-column table:style-name="co22" table:default-cell-style-name="ce152"/>
        <table:table-column table:style-name="co29" table:default-cell-style-name="ce154"/>
        <table:table-column table:style-name="co1" table:default-cell-style-name="Default"/>
        <table:table-column table:style-name="co31" table:default-cell-style-name="Default"/>
        <table:table-column table:style-name="co1" table:number-columns-repeated="16374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c.) Tabla de amortizacion de la deuda</text:p>
          </table:table-cell>
          <table:table-cell table:style-name="Default" table:number-columns-repeated="4"/>
          <table:table-cell table:style-name="Default" office:value-type="string" calcext:value-type="string">
            <text:p>Amortización constante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138" table:number-columns-repeated="2"/>
          <table:table-cell table:style-name="ce140" office:value-type="string" calcext:value-type="string">
            <text:p>Prestamo =</text:p>
          </table:table-cell>
          <table:table-cell table:style-name="ce144" table:formula="of:=-0.3*[$'FC Economico'.C146]" office:value-type="float" office:value="2272987.5" calcext:value-type="float">
            <text:p>2272988</text:p>
          </table:table-cell>
          <table:table-cell table:style-name="ce138" table:number-columns-repeated="3"/>
          <table:table-cell table:number-columns-repeated="16376"/>
        </table:table-row>
        <table:table-row table:style-name="ro1">
          <table:table-cell/>
          <table:table-cell table:style-name="ce138" table:number-columns-repeated="2"/>
          <table:table-cell table:style-name="ce140" office:value-type="string" calcext:value-type="string">
            <text:p>TEA nominal =</text:p>
          </table:table-cell>
          <table:table-cell table:style-name="ce145" office:value-type="percentage" office:value="0.24" calcext:value-type="percentage">
            <text:p>24 %</text:p>
          </table:table-cell>
          <table:table-cell table:style-name="ce138" table:number-columns-repeated="3"/>
          <table:table-cell table:number-columns-repeated="16376"/>
        </table:table-row>
        <table:table-row table:style-name="ro1">
          <table:table-cell/>
          <table:table-cell table:style-name="ce138" table:number-columns-repeated="2"/>
          <table:table-cell table:style-name="ce140" office:value-type="string" calcext:value-type="string">
            <text:p>TEM nominal¨=</text:p>
          </table:table-cell>
          <table:table-cell table:style-name="ce146" table:formula="of:=POWER((1+[.E4]);(1/12))-1" office:value-type="percentage" office:value="0.0180875824835107" calcext:value-type="percentage">
            <text:p>1.8%</text:p>
          </table:table-cell>
          <table:table-cell table:style-name="ce140" table:number-columns-repeated="2"/>
          <table:table-cell table:style-name="ce138"/>
          <table:table-cell/>
          <table:table-cell table:style-name="ce15" office:value-type="string" calcext:value-type="string">
            <text:p>RUBR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/>
          <table:table-cell table:style-name="ce138" table:number-columns-repeated="2"/>
          <table:table-cell table:style-name="ce140" office:value-type="string" calcext:value-type="string">
            <text:p>Inflacion Anual =</text:p>
          </table:table-cell>
          <table:table-cell table:style-name="ce146" office:value-type="percentage" office:value="0.02" calcext:value-type="percentage">
            <text:p>2.0%</text:p>
          </table:table-cell>
          <table:table-cell table:style-name="ce140" table:number-columns-repeated="2"/>
          <table:table-cell table:style-name="ce138"/>
          <table:table-cell/>
          <table:table-cell table:style-name="ce16" office:value-type="string" calcext:value-type="string">
            <text:p>Cuota de capital</text:p>
          </table:table-cell>
          <table:table-cell table:style-name="ce155" table:formula="of:=SUM([.F13:.F24])" office:value-type="float" office:value="615388.82975955" calcext:value-type="float">
            <text:p>615388.8</text:p>
          </table:table-cell>
          <table:table-cell table:style-name="ce155" table:formula="of:=SUM([.F25:.F36])" office:value-type="float" office:value="748119.753825336" calcext:value-type="float">
            <text:p>748119.8</text:p>
          </table:table-cell>
          <table:table-cell table:style-name="ce155" table:formula="of:=SUM([.F37:.F48])" office:value-type="float" office:value="909478.916415114" calcext:value-type="float">
            <text:p>909478.9</text:p>
          </table:table-cell>
          <table:table-cell table:number-columns-repeated="16371"/>
        </table:table-row>
        <table:table-row table:style-name="ro1">
          <table:table-cell/>
          <table:table-cell table:style-name="ce138" table:number-columns-repeated="2"/>
          <table:table-cell table:style-name="ce140" office:value-type="string" calcext:value-type="string">
            <text:p>Inflacion mes =</text:p>
          </table:table-cell>
          <table:table-cell table:style-name="ce147" table:formula="of:=POWER((1+[.E6]);(1/12))-1" office:value-type="percentage" office:value="0.00165158130192022" calcext:value-type="percentage">
            <text:p>0.17 %</text:p>
          </table:table-cell>
          <table:table-cell table:style-name="ce140"/>
          <table:table-cell table:style-name="ce138" table:number-columns-repeated="2"/>
          <table:table-cell/>
          <table:table-cell table:style-name="ce16" office:value-type="string" calcext:value-type="string">
            <text:p>Interes</text:p>
          </table:table-cell>
          <table:table-cell table:style-name="ce143" table:formula="of:=SUM([.E13:.E24])" office:value-type="float" office:value="393985.76324999" calcext:value-type="float">
            <text:p>393986</text:p>
          </table:table-cell>
          <table:table-cell table:style-name="ce143" table:formula="of:=SUM([.E25:.E36])" office:value-type="float" office:value="261254.839184204" calcext:value-type="float">
            <text:p>261255</text:p>
          </table:table-cell>
          <table:table-cell table:style-name="ce143" table:formula="of:=SUM([.E37:.E48])" office:value-type="float" office:value="99895.6765944258" calcext:value-type="float">
            <text:p>99896</text:p>
          </table:table-cell>
          <table:table-cell table:number-columns-repeated="16371"/>
        </table:table-row>
        <table:table-row table:style-name="ro1">
          <table:table-cell/>
          <table:table-cell table:style-name="ce138" table:number-columns-repeated="2"/>
          <table:table-cell table:style-name="ce141" office:value-type="string" calcext:value-type="string">
            <text:p>TEM real =</text:p>
          </table:table-cell>
          <table:table-cell table:style-name="ce148" table:formula="of:=((1+[.E5])/(1+[.E7]))-1" office:value-type="percentage" office:value="0.0164089005482599" calcext:value-type="percentage">
            <text:p>1.64 %</text:p>
          </table:table-cell>
          <table:table-cell table:style-name="ce140"/>
          <table:table-cell table:style-name="ce138" table:number-columns-repeated="2"/>
          <table:table-cell/>
          <table:table-cell table:style-name="ce16" office:value-type="string" calcext:value-type="string">
            <text:p>Amortización</text:p>
          </table:table-cell>
          <table:table-cell table:style-name="ce155" table:formula="of:=[.K6]+[.K7]" office:value-type="float" office:value="1009374.59300954" calcext:value-type="float">
            <text:p>1009374.6</text:p>
          </table:table-cell>
          <table:table-cell table:style-name="ce155" table:formula="of:=[.L6]+[.L7]" office:value-type="float" office:value="1009374.59300954" calcext:value-type="float">
            <text:p>1009374.6</text:p>
          </table:table-cell>
          <table:table-cell table:style-name="ce155" table:formula="of:=[.M6]+[.M7]" office:value-type="float" office:value="1009374.59300954" calcext:value-type="float">
            <text:p>1009374.6</text:p>
          </table:table-cell>
          <table:table-cell table:number-columns-repeated="16371"/>
        </table:table-row>
        <table:table-row table:style-name="ro1">
          <table:table-cell/>
          <table:table-cell table:style-name="ce138" table:number-columns-repeated="2"/>
          <table:table-cell table:style-name="ce140" office:value-type="string" calcext:value-type="string">
            <text:p>n =</text:p>
          </table:table-cell>
          <table:table-cell table:style-name="ce138" office:value-type="float" office:value="36" calcext:value-type="float">
            <text:p>36</text:p>
          </table:table-cell>
          <table:table-cell table:style-name="ce138" table:number-columns-repeated="3"/>
          <table:table-cell table:number-columns-repeated="16376"/>
        </table:table-row>
        <table:table-row table:style-name="ro1">
          <table:table-cell/>
          <table:table-cell table:style-name="ce138" table:number-columns-repeated="2"/>
          <table:table-cell table:style-name="ce140" office:value-type="string" calcext:value-type="string">
            <text:p>Amortización =</text:p>
          </table:table-cell>
          <table:table-cell table:style-name="ce149" table:formula="of:=-PMT([.E8];[.E9];[.E3])" office:value-type="float" office:value="84114.5494174617" calcext:value-type="float">
            <text:p>84114.5</text:p>
          </table:table-cell>
          <table:table-cell table:style-name="ce138" table:number-columns-repeated="3"/>
          <table:table-cell table:number-columns-repeated="16376"/>
        </table:table-row>
        <table:table-row table:style-name="ro1">
          <table:table-cell/>
          <table:table-cell table:style-name="ce138" table:number-columns-repeated="7"/>
          <table:table-cell table:number-columns-repeated="16376"/>
        </table:table-row>
        <table:table-row table:style-name="ro1">
          <table:table-cell table:number-columns-repeated="2"/>
          <table:table-cell table:style-name="ce139" office:value-type="string" calcext:value-type="string">
            <text:p>Trimestres</text:p>
          </table:table-cell>
          <table:table-cell table:style-name="ce142" office:value-type="string" calcext:value-type="string">
            <text:p>Saldo inicial</text:p>
          </table:table-cell>
          <table:table-cell table:style-name="ce142" office:value-type="string" calcext:value-type="string">
            <text:p>Interes</text:p>
          </table:table-cell>
          <table:table-cell table:style-name="ce142" office:value-type="string" calcext:value-type="string">
            <text:p>Cuota</text:p>
          </table:table-cell>
          <table:table-cell table:style-name="ce142" office:value-type="string" calcext:value-type="string">
            <text:p>Amortizacion</text:p>
          </table:table-cell>
          <table:table-cell table:style-name="ce153" office:value-type="string" calcext:value-type="string">
            <text:p>Saldo final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E3]" office:value-type="float" office:value="2272987.5" calcext:value-type="float">
            <text:p>2272988</text:p>
          </table:table-cell>
          <table:table-cell table:formula="of:=[.$E$8]*[.D13]" office:value-type="float" office:value="37297.225834938" calcext:value-type="float">
            <text:p>37297</text:p>
          </table:table-cell>
          <table:table-cell table:formula="of:=[.G13]-[.E13]" office:value-type="float" office:value="46817.3235825237" calcext:value-type="float">
            <text:p>46817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3]-[.F13]" office:value-type="float" office:value="2226170.17641748" calcext:value-type="float">
            <text:p>222617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3]+1" office:value-type="float" office:value="2" calcext:value-type="float">
            <text:p>2</text:p>
          </table:table-cell>
          <table:table-cell table:formula="of:=[.H13]" office:value-type="float" office:value="2226170.17641748" calcext:value-type="float">
            <text:p>2226170</text:p>
          </table:table-cell>
          <table:table-cell table:formula="of:=[.$E$8]*[.D14]" office:value-type="float" office:value="36529.0050283367" calcext:value-type="float">
            <text:p>36529</text:p>
          </table:table-cell>
          <table:table-cell table:formula="of:=[.G14]-[.E14]" office:value-type="float" office:value="47585.544389125" calcext:value-type="float">
            <text:p>47585.5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4]-[.F14]" office:value-type="float" office:value="2178584.63202835" calcext:value-type="float">
            <text:p>217858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4]+1" office:value-type="float" office:value="3" calcext:value-type="float">
            <text:p>3</text:p>
          </table:table-cell>
          <table:table-cell table:formula="of:=[.H14]" office:value-type="float" office:value="2178584.63202835" calcext:value-type="float">
            <text:p>2178585</text:p>
          </table:table-cell>
          <table:table-cell table:formula="of:=[.$E$8]*[.D15]" office:value-type="float" office:value="35748.1785629207" calcext:value-type="float">
            <text:p>35748</text:p>
          </table:table-cell>
          <table:table-cell table:formula="of:=[.G15]-[.E15]" office:value-type="float" office:value="48366.370854541" calcext:value-type="float">
            <text:p>48366.4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5]-[.F15]" office:value-type="float" office:value="2130218.26117381" calcext:value-type="float">
            <text:p>213021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5]+1" office:value-type="float" office:value="4" calcext:value-type="float">
            <text:p>4</text:p>
          </table:table-cell>
          <table:table-cell table:formula="of:=[.H15]" office:value-type="float" office:value="2130218.26117381" calcext:value-type="float">
            <text:p>2130218</text:p>
          </table:table-cell>
          <table:table-cell table:formula="of:=[.$E$8]*[.D16]" office:value-type="float" office:value="34954.5395936883" calcext:value-type="float">
            <text:p>34955</text:p>
          </table:table-cell>
          <table:table-cell table:formula="of:=[.G16]-[.E16]" office:value-type="float" office:value="49160.0098237734" calcext:value-type="float">
            <text:p>49160.0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6]-[.F16]" office:value-type="float" office:value="2081058.25135004" calcext:value-type="float">
            <text:p>208105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6]+1" office:value-type="float" office:value="5" calcext:value-type="float">
            <text:p>5</text:p>
          </table:table-cell>
          <table:table-cell table:formula="of:=[.H16]" office:value-type="float" office:value="2081058.25135004" calcext:value-type="float">
            <text:p>2081058</text:p>
          </table:table-cell>
          <table:table-cell table:formula="of:=[.$E$8]*[.D17]" office:value-type="float" office:value="34147.8778815385" calcext:value-type="float">
            <text:p>34148</text:p>
          </table:table-cell>
          <table:table-cell table:formula="of:=[.G17]-[.E17]" office:value-type="float" office:value="49966.6715359232" calcext:value-type="float">
            <text:p>49966.7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7]-[.F17]" office:value-type="float" office:value="2031091.57981411" calcext:value-type="float">
            <text:p>203109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7]+1" office:value-type="float" office:value="6" calcext:value-type="float">
            <text:p>6</text:p>
          </table:table-cell>
          <table:table-cell table:formula="of:=[.H17]" office:value-type="float" office:value="2031091.57981411" calcext:value-type="float">
            <text:p>2031092</text:p>
          </table:table-cell>
          <table:table-cell table:formula="of:=[.$E$8]*[.D18]" office:value-type="float" office:value="33327.979737578" calcext:value-type="float">
            <text:p>33328</text:p>
          </table:table-cell>
          <table:table-cell table:formula="of:=[.G18]-[.E18]" office:value-type="float" office:value="50786.5696798837" calcext:value-type="float">
            <text:p>50786.6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8]-[.F18]" office:value-type="float" office:value="1980305.01013423" calcext:value-type="float">
            <text:p>198030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8]+1" office:value-type="float" office:value="7" calcext:value-type="float">
            <text:p>7</text:p>
          </table:table-cell>
          <table:table-cell table:formula="of:=[.H18]" office:value-type="float" office:value="1980305.01013423" calcext:value-type="float">
            <text:p>1980305</text:p>
          </table:table-cell>
          <table:table-cell table:formula="of:=[.$E$8]*[.D19]" office:value-type="float" office:value="32494.6279665135" calcext:value-type="float">
            <text:p>32495</text:p>
          </table:table-cell>
          <table:table-cell table:formula="of:=[.G19]-[.E19]" office:value-type="float" office:value="51619.9214509482" calcext:value-type="float">
            <text:p>51619.9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19]-[.F19]" office:value-type="float" office:value="1928685.08868328" calcext:value-type="float">
            <text:p>192868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9]+1" office:value-type="float" office:value="8" calcext:value-type="float">
            <text:p>8</text:p>
          </table:table-cell>
          <table:table-cell table:formula="of:=[.H19]" office:value-type="float" office:value="1928685.08868328" calcext:value-type="float">
            <text:p>1928685</text:p>
          </table:table-cell>
          <table:table-cell table:formula="of:=[.$E$8]*[.D20]" office:value-type="float" office:value="31647.6018091159" calcext:value-type="float">
            <text:p>31648</text:p>
          </table:table-cell>
          <table:table-cell table:formula="of:=[.G20]-[.E20]" office:value-type="float" office:value="52466.9476083458" calcext:value-type="float">
            <text:p>52466.9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0]-[.F20]" office:value-type="float" office:value="1876218.14107494" calcext:value-type="float">
            <text:p>187621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0]+1" office:value-type="float" office:value="9" calcext:value-type="float">
            <text:p>9</text:p>
          </table:table-cell>
          <table:table-cell table:formula="of:=[.H20]" office:value-type="float" office:value="1876218.14107494" calcext:value-type="float">
            <text:p>1876218</text:p>
          </table:table-cell>
          <table:table-cell table:formula="of:=[.$E$8]*[.D21]" office:value-type="float" office:value="30786.6768837398" calcext:value-type="float">
            <text:p>30787</text:p>
          </table:table-cell>
          <table:table-cell table:formula="of:=[.G21]-[.E21]" office:value-type="float" office:value="53327.8725337219" calcext:value-type="float">
            <text:p>53327.9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1]-[.F21]" office:value-type="float" office:value="1822890.26854121" calcext:value-type="float">
            <text:p>182289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1]+1" office:value-type="float" office:value="10" calcext:value-type="float">
            <text:p>10</text:p>
          </table:table-cell>
          <table:table-cell table:formula="of:=[.H21]" office:value-type="float" office:value="1822890.26854121" calcext:value-type="float">
            <text:p>1822890</text:p>
          </table:table-cell>
          <table:table-cell table:formula="of:=[.$E$8]*[.D22]" office:value-type="float" office:value="29911.6251268836" calcext:value-type="float">
            <text:p>29912</text:p>
          </table:table-cell>
          <table:table-cell table:formula="of:=[.G22]-[.E22]" office:value-type="float" office:value="54202.924290578" calcext:value-type="float">
            <text:p>54202.9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2]-[.F22]" office:value-type="float" office:value="1768687.34425064" calcext:value-type="float">
            <text:p>176868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2]+1" office:value-type="float" office:value="11" calcext:value-type="float">
            <text:p>11</text:p>
          </table:table-cell>
          <table:table-cell table:formula="of:=[.H22]" office:value-type="float" office:value="1768687.34425064" calcext:value-type="float">
            <text:p>1768687</text:p>
          </table:table-cell>
          <table:table-cell table:formula="of:=[.$E$8]*[.D23]" office:value-type="float" office:value="29022.2147327747" calcext:value-type="float">
            <text:p>29022</text:p>
          </table:table-cell>
          <table:table-cell table:formula="of:=[.G23]-[.E23]" office:value-type="float" office:value="55092.334684687" calcext:value-type="float">
            <text:p>55092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3]-[.F23]" office:value-type="float" office:value="1713595.00956595" calcext:value-type="float">
            <text:p>171359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3]+1" office:value-type="float" office:value="12" calcext:value-type="float">
            <text:p>12</text:p>
          </table:table-cell>
          <table:table-cell table:formula="of:=[.H23]" office:value-type="float" office:value="1713595.00956595" calcext:value-type="float">
            <text:p>1713595</text:p>
          </table:table-cell>
          <table:table-cell table:formula="of:=[.$E$8]*[.D24]" office:value-type="float" office:value="28118.2100919622" calcext:value-type="float">
            <text:p>28118</text:p>
          </table:table-cell>
          <table:table-cell table:formula="of:=[.G24]-[.E24]" office:value-type="float" office:value="55996.3393254995" calcext:value-type="float">
            <text:p>55996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4]-[.F24]" office:value-type="float" office:value="1657598.67024045" calcext:value-type="float">
            <text:p>165759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4]+1" office:value-type="float" office:value="13" calcext:value-type="float">
            <text:p>13</text:p>
          </table:table-cell>
          <table:table-cell table:formula="of:=[.H24]" office:value-type="float" office:value="1657598.67024045" calcext:value-type="float">
            <text:p>1657599</text:p>
          </table:table-cell>
          <table:table-cell table:formula="of:=[.$E$8]*[.D25]" office:value-type="float" office:value="27199.3717289035" calcext:value-type="float">
            <text:p>27199</text:p>
          </table:table-cell>
          <table:table-cell table:formula="of:=[.G25]-[.E25]" office:value-type="float" office:value="56915.1776885582" calcext:value-type="float">
            <text:p>56915.2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5]-[.F25]" office:value-type="float" office:value="1600683.49255189" calcext:value-type="float">
            <text:p>160068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5]+1" office:value-type="float" office:value="14" calcext:value-type="float">
            <text:p>14</text:p>
          </table:table-cell>
          <table:table-cell table:formula="of:=[.H25]" office:value-type="float" office:value="1600683.49255189" calcext:value-type="float">
            <text:p>1600683</text:p>
          </table:table-cell>
          <table:table-cell table:formula="of:=[.$E$8]*[.D26]" office:value-type="float" office:value="26265.4562385254" calcext:value-type="float">
            <text:p>26265</text:p>
          </table:table-cell>
          <table:table-cell table:formula="of:=[.G26]-[.E26]" office:value-type="float" office:value="57849.0931789363" calcext:value-type="float">
            <text:p>57849.1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6]-[.F26]" office:value-type="float" office:value="1542834.39937296" calcext:value-type="float">
            <text:p>154283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6]+1" office:value-type="float" office:value="15" calcext:value-type="float">
            <text:p>15</text:p>
          </table:table-cell>
          <table:table-cell table:formula="of:=[.H26]" office:value-type="float" office:value="1542834.39937296" calcext:value-type="float">
            <text:p>1542834</text:p>
          </table:table-cell>
          <table:table-cell table:formula="of:=[.$E$8]*[.D27]" office:value-type="float" office:value="25316.2162217452" calcext:value-type="float">
            <text:p>25316</text:p>
          </table:table-cell>
          <table:table-cell table:formula="of:=[.G27]-[.E27]" office:value-type="float" office:value="58798.3331957165" calcext:value-type="float">
            <text:p>58798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7]-[.F27]" office:value-type="float" office:value="1484036.06617724" calcext:value-type="float">
            <text:p>148403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7]+1" office:value-type="float" office:value="16" calcext:value-type="float">
            <text:p>16</text:p>
          </table:table-cell>
          <table:table-cell table:formula="of:=[.H27]" office:value-type="float" office:value="1484036.06617724" calcext:value-type="float">
            <text:p>1484036</text:p>
          </table:table-cell>
          <table:table-cell table:formula="of:=[.$E$8]*[.D28]" office:value-type="float" office:value="24351.4002199332" calcext:value-type="float">
            <text:p>24351</text:p>
          </table:table-cell>
          <table:table-cell table:formula="of:=[.G28]-[.E28]" office:value-type="float" office:value="59763.1491975285" calcext:value-type="float">
            <text:p>59763.1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8]-[.F28]" office:value-type="float" office:value="1424272.91697971" calcext:value-type="float">
            <text:p>142427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8]+1" office:value-type="float" office:value="17" calcext:value-type="float">
            <text:p>17</text:p>
          </table:table-cell>
          <table:table-cell table:formula="of:=[.H28]" office:value-type="float" office:value="1424272.91697971" calcext:value-type="float">
            <text:p>1424273</text:p>
          </table:table-cell>
          <table:table-cell table:formula="of:=[.$E$8]*[.D29]" office:value-type="float" office:value="23370.7526483002" calcext:value-type="float">
            <text:p>23371</text:p>
          </table:table-cell>
          <table:table-cell table:formula="of:=[.G29]-[.E29]" office:value-type="float" office:value="60743.7967691615" calcext:value-type="float">
            <text:p>60743.8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29]-[.F29]" office:value-type="float" office:value="1363529.12021055" calcext:value-type="float">
            <text:p>136352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9]+1" office:value-type="float" office:value="18" calcext:value-type="float">
            <text:p>18</text:p>
          </table:table-cell>
          <table:table-cell table:formula="of:=[.H29]" office:value-type="float" office:value="1363529.12021055" calcext:value-type="float">
            <text:p>1363529</text:p>
          </table:table-cell>
          <table:table-cell table:formula="of:=[.$E$8]*[.D30]" office:value-type="float" office:value="22374.0137281913" calcext:value-type="float">
            <text:p>22374</text:p>
          </table:table-cell>
          <table:table-cell table:formula="of:=[.G30]-[.E30]" office:value-type="float" office:value="61740.5356892704" calcext:value-type="float">
            <text:p>61740.5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0]-[.F30]" office:value-type="float" office:value="1301788.58452128" calcext:value-type="float">
            <text:p>130178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0]+1" office:value-type="float" office:value="19" calcext:value-type="float">
            <text:p>19</text:p>
          </table:table-cell>
          <table:table-cell table:formula="of:=[.H30]" office:value-type="float" office:value="1301788.58452128" calcext:value-type="float">
            <text:p>1301789</text:p>
          </table:table-cell>
          <table:table-cell table:formula="of:=[.$E$8]*[.D31]" office:value-type="float" office:value="21360.9194182697" calcext:value-type="float">
            <text:p>21361</text:p>
          </table:table-cell>
          <table:table-cell table:formula="of:=[.G31]-[.E31]" office:value-type="float" office:value="62753.6299991919" calcext:value-type="float">
            <text:p>62753.6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1]-[.F31]" office:value-type="float" office:value="1239034.95452209" calcext:value-type="float">
            <text:p>123903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1]+1" office:value-type="float" office:value="20" calcext:value-type="float">
            <text:p>20</text:p>
          </table:table-cell>
          <table:table-cell table:formula="of:=[.H31]" office:value-type="float" office:value="1239034.95452209" calcext:value-type="float">
            <text:p>1239035</text:p>
          </table:table-cell>
          <table:table-cell table:formula="of:=[.$E$8]*[.D32]" office:value-type="float" office:value="20331.2013445707" calcext:value-type="float">
            <text:p>20331</text:p>
          </table:table-cell>
          <table:table-cell table:formula="of:=[.G32]-[.E32]" office:value-type="float" office:value="63783.348072891" calcext:value-type="float">
            <text:p>63783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2]-[.F32]" office:value-type="float" office:value="1175251.6064492" calcext:value-type="float">
            <text:p>117525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2]+1" office:value-type="float" office:value="21" calcext:value-type="float">
            <text:p>21</text:p>
          </table:table-cell>
          <table:table-cell table:formula="of:=[.H32]" office:value-type="float" office:value="1175251.6064492" calcext:value-type="float">
            <text:p>1175252</text:p>
          </table:table-cell>
          <table:table-cell table:formula="of:=[.$E$8]*[.D33]" office:value-type="float" office:value="19284.5867294076" calcext:value-type="float">
            <text:p>19285</text:p>
          </table:table-cell>
          <table:table-cell table:formula="of:=[.G33]-[.E33]" office:value-type="float" office:value="64829.9626880541" calcext:value-type="float">
            <text:p>64830.0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3]-[.F33]" office:value-type="float" office:value="1110421.64376114" calcext:value-type="float">
            <text:p>111042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3]+1" office:value-type="float" office:value="22" calcext:value-type="float">
            <text:p>22</text:p>
          </table:table-cell>
          <table:table-cell table:formula="of:=[.H33]" office:value-type="float" office:value="1110421.64376114" calcext:value-type="float">
            <text:p>1110422</text:p>
          </table:table-cell>
          <table:table-cell table:formula="of:=[.$E$8]*[.D34]" office:value-type="float" office:value="18220.7983191119" calcext:value-type="float">
            <text:p>18221</text:p>
          </table:table-cell>
          <table:table-cell table:formula="of:=[.G34]-[.E34]" office:value-type="float" office:value="65893.7510983498" calcext:value-type="float">
            <text:p>65893.8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4]-[.F34]" office:value-type="float" office:value="1044527.89266279" calcext:value-type="float">
            <text:p>104452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4]+1" office:value-type="float" office:value="23" calcext:value-type="float">
            <text:p>23</text:p>
          </table:table-cell>
          <table:table-cell table:formula="of:=[.H34]" office:value-type="float" office:value="1044527.89266279" calcext:value-type="float">
            <text:p>1044528</text:p>
          </table:table-cell>
          <table:table-cell table:formula="of:=[.$E$8]*[.D35]" office:value-type="float" office:value="17139.5543105873" calcext:value-type="float">
            <text:p>17140</text:p>
          </table:table-cell>
          <table:table-cell table:formula="of:=[.G35]-[.E35]" office:value-type="float" office:value="66974.9951068744" calcext:value-type="float">
            <text:p>66975.0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5]-[.F35]" office:value-type="float" office:value="977552.897555917" calcext:value-type="float">
            <text:p>97755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5]+1" office:value-type="float" office:value="24" calcext:value-type="float">
            <text:p>24</text:p>
          </table:table-cell>
          <table:table-cell table:formula="of:=[.H35]" office:value-type="float" office:value="977552.897555917" calcext:value-type="float">
            <text:p>977553</text:p>
          </table:table-cell>
          <table:table-cell table:formula="of:=[.$E$8]*[.D36]" office:value-type="float" office:value="16040.5682766584" calcext:value-type="float">
            <text:p>16041</text:p>
          </table:table-cell>
          <table:table-cell table:formula="of:=[.G36]-[.E36]" office:value-type="float" office:value="68073.9811408033" calcext:value-type="float">
            <text:p>68074.0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6]-[.F36]" office:value-type="float" office:value="909478.916415114" calcext:value-type="float">
            <text:p>90947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6]+1" office:value-type="float" office:value="25" calcext:value-type="float">
            <text:p>25</text:p>
          </table:table-cell>
          <table:table-cell table:formula="of:=[.H36]" office:value-type="float" office:value="909478.916415114" calcext:value-type="float">
            <text:p>909479</text:p>
          </table:table-cell>
          <table:table-cell table:formula="of:=[.$E$8]*[.D37]" office:value-type="float" office:value="14923.5490901948" calcext:value-type="float">
            <text:p>14924</text:p>
          </table:table-cell>
          <table:table-cell table:formula="of:=[.G37]-[.E37]" office:value-type="float" office:value="69191.0003272669" calcext:value-type="float">
            <text:p>69191.0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7]-[.F37]" office:value-type="float" office:value="840287.916087847" calcext:value-type="float">
            <text:p>84028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7]+1" office:value-type="float" office:value="26" calcext:value-type="float">
            <text:p>26</text:p>
          </table:table-cell>
          <table:table-cell table:formula="of:=[.H37]" office:value-type="float" office:value="840287.916087847" calcext:value-type="float">
            <text:p>840288</text:p>
          </table:table-cell>
          <table:table-cell table:formula="of:=[.$E$8]*[.D38]" office:value-type="float" office:value="13788.2008469901" calcext:value-type="float">
            <text:p>13788</text:p>
          </table:table-cell>
          <table:table-cell table:formula="of:=[.G38]-[.E38]" office:value-type="float" office:value="70326.3485704716" calcext:value-type="float">
            <text:p>70326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8]-[.F38]" office:value-type="float" office:value="769961.567517376" calcext:value-type="float">
            <text:p>76996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8]+1" office:value-type="float" office:value="27" calcext:value-type="float">
            <text:p>27</text:p>
          </table:table-cell>
          <table:table-cell table:formula="of:=[.H38]" office:value-type="float" office:value="769961.567517376" calcext:value-type="float">
            <text:p>769962</text:p>
          </table:table-cell>
          <table:table-cell table:formula="of:=[.$E$8]*[.D39]" office:value-type="float" office:value="12634.2227873749" calcext:value-type="float">
            <text:p>12634</text:p>
          </table:table-cell>
          <table:table-cell table:formula="of:=[.G39]-[.E39]" office:value-type="float" office:value="71480.3266300867" calcext:value-type="float">
            <text:p>71480.3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39]-[.F39]" office:value-type="float" office:value="698481.240887289" calcext:value-type="float">
            <text:p>69848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9]+1" office:value-type="float" office:value="28" calcext:value-type="float">
            <text:p>28</text:p>
          </table:table-cell>
          <table:table-cell table:formula="of:=[.H39]" office:value-type="float" office:value="698481.240887289" calcext:value-type="float">
            <text:p>698481</text:p>
          </table:table-cell>
          <table:table-cell table:formula="of:=[.$E$8]*[.D40]" office:value-type="float" office:value="11461.3092165447" calcext:value-type="float">
            <text:p>11461</text:p>
          </table:table-cell>
          <table:table-cell table:formula="of:=[.G40]-[.E40]" office:value-type="float" office:value="72653.240200917" calcext:value-type="float">
            <text:p>72653.2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0]-[.F40]" office:value-type="float" office:value="625828.000686372" calcext:value-type="float">
            <text:p>62582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0]+1" office:value-type="float" office:value="29" calcext:value-type="float">
            <text:p>29</text:p>
          </table:table-cell>
          <table:table-cell table:formula="of:=[.H40]" office:value-type="float" office:value="625828.000686372" calcext:value-type="float">
            <text:p>625828</text:p>
          </table:table-cell>
          <table:table-cell table:formula="of:=[.$E$8]*[.D41]" office:value-type="float" office:value="10269.149423579" calcext:value-type="float">
            <text:p>10269</text:p>
          </table:table-cell>
          <table:table-cell table:formula="of:=[.G41]-[.E41]" office:value-type="float" office:value="73845.3999938827" calcext:value-type="float">
            <text:p>73845.4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1]-[.F41]" office:value-type="float" office:value="551982.600692489" calcext:value-type="float">
            <text:p>55198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1]+1" office:value-type="float" office:value="30" calcext:value-type="float">
            <text:p>30</text:p>
          </table:table-cell>
          <table:table-cell table:formula="of:=[.H41]" office:value-type="float" office:value="551982.600692489" calcext:value-type="float">
            <text:p>551983</text:p>
          </table:table-cell>
          <table:table-cell table:formula="of:=[.$E$8]*[.D42]" office:value-type="float" office:value="9057.42759913293" calcext:value-type="float">
            <text:p>9057</text:p>
          </table:table-cell>
          <table:table-cell table:formula="of:=[.G42]-[.E42]" office:value-type="float" office:value="75057.1218183287" calcext:value-type="float">
            <text:p>75057.1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2]-[.F42]" office:value-type="float" office:value="476925.47887416" calcext:value-type="float">
            <text:p>47692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2]+1" office:value-type="float" office:value="31" calcext:value-type="float">
            <text:p>31</text:p>
          </table:table-cell>
          <table:table-cell table:formula="of:=[.H42]" office:value-type="float" office:value="476925.47887416" calcext:value-type="float">
            <text:p>476925</text:p>
          </table:table-cell>
          <table:table-cell table:formula="of:=[.$E$8]*[.D43]" office:value-type="float" office:value="7825.82275177735" calcext:value-type="float">
            <text:p>7826</text:p>
          </table:table-cell>
          <table:table-cell table:formula="of:=[.G43]-[.E43]" office:value-type="float" office:value="76288.7266656843" calcext:value-type="float">
            <text:p>76288.7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3]-[.F43]" office:value-type="float" office:value="400636.752208476" calcext:value-type="float">
            <text:p>40063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3]+1" office:value-type="float" office:value="32" calcext:value-type="float">
            <text:p>32</text:p>
          </table:table-cell>
          <table:table-cell table:formula="of:=[.H43]" office:value-type="float" office:value="400636.752208476" calcext:value-type="float">
            <text:p>400637</text:p>
          </table:table-cell>
          <table:table-cell table:formula="of:=[.$E$8]*[.D44]" office:value-type="float" office:value="6574.00862296674" calcext:value-type="float">
            <text:p>6574</text:p>
          </table:table-cell>
          <table:table-cell table:formula="of:=[.G44]-[.E44]" office:value-type="float" office:value="77540.5407944949" calcext:value-type="float">
            <text:p>77540.5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4]-[.F44]" office:value-type="float" office:value="323096.211413981" calcext:value-type="float">
            <text:p>32309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4]+1" office:value-type="float" office:value="33" calcext:value-type="float">
            <text:p>33</text:p>
          </table:table-cell>
          <table:table-cell table:formula="of:=[.H44]" office:value-type="float" office:value="323096.211413981" calcext:value-type="float">
            <text:p>323096</text:p>
          </table:table-cell>
          <table:table-cell table:formula="of:=[.$E$8]*[.D45]" office:value-type="float" office:value="5301.65360061159" calcext:value-type="float">
            <text:p>5302</text:p>
          </table:table-cell>
          <table:table-cell table:formula="of:=[.G45]-[.E45]" office:value-type="float" office:value="78812.8958168501" calcext:value-type="float">
            <text:p>78812.9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5]-[.F45]" office:value-type="float" office:value="244283.315597131" calcext:value-type="float">
            <text:p>24428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5]+1" office:value-type="float" office:value="34" calcext:value-type="float">
            <text:p>34</text:p>
          </table:table-cell>
          <table:table-cell table:formula="of:=[.H45]" office:value-type="float" office:value="244283.315597131" calcext:value-type="float">
            <text:p>244283</text:p>
          </table:table-cell>
          <table:table-cell table:formula="of:=[.$E$8]*[.D46]" office:value-type="float" office:value="4008.42063123252" calcext:value-type="float">
            <text:p>4008</text:p>
          </table:table-cell>
          <table:table-cell table:formula="of:=[.G46]-[.E46]" office:value-type="float" office:value="80106.1287862292" calcext:value-type="float">
            <text:p>80106.1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6]-[.F46]" office:value-type="float" office:value="164177.186810902" calcext:value-type="float">
            <text:p>16417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6]+1" office:value-type="float" office:value="35" calcext:value-type="float">
            <text:p>35</text:p>
          </table:table-cell>
          <table:table-cell table:formula="of:=[.H46]" office:value-type="float" office:value="164177.186810902" calcext:value-type="float">
            <text:p>164177</text:p>
          </table:table-cell>
          <table:table-cell table:formula="of:=[.$E$8]*[.D47]" office:value-type="float" office:value="2693.96713067318" calcext:value-type="float">
            <text:p>2694</text:p>
          </table:table-cell>
          <table:table-cell table:formula="of:=[.G47]-[.E47]" office:value-type="float" office:value="81420.5822867885" calcext:value-type="float">
            <text:p>81420.6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7]-[.F47]" office:value-type="float" office:value="82756.6045241134" calcext:value-type="float">
            <text:p>8275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47]+1" office:value-type="float" office:value="36" calcext:value-type="float">
            <text:p>36</text:p>
          </table:table-cell>
          <table:table-cell table:formula="of:=[.H47]" office:value-type="float" office:value="82756.6045241134" calcext:value-type="float">
            <text:p>82757</text:p>
          </table:table-cell>
          <table:table-cell table:formula="of:=[.$E$8]*[.D48]" office:value-type="float" office:value="1357.94489334785" calcext:value-type="float">
            <text:p>1358</text:p>
          </table:table-cell>
          <table:table-cell table:formula="of:=[.G48]-[.E48]" office:value-type="float" office:value="82756.6045241138" calcext:value-type="float">
            <text:p>82756.6</text:p>
          </table:table-cell>
          <table:table-cell table:formula="of:=[.$E$10]" office:value-type="float" office:value="84114.5494174617" calcext:value-type="float">
            <text:p>84115</text:p>
          </table:table-cell>
          <table:table-cell table:formula="of:=[.D48]-[.F48]" office:value-type="float" office:value="-0.000000000465661287307739" calcext:value-type="float">
            <text:p>0</text:p>
          </table:table-cell>
          <table:table-cell table:number-columns-repeated="16376"/>
        </table:table-row>
      </table:table>
      <table:table table:name="FCD Y FCF" table:style-name="ta5">
        <table:table-column table:style-name="co1" table:number-columns-repeated="2" table:default-cell-style-name="Default"/>
        <table:table-column table:style-name="co32" table:default-cell-style-name="ce159"/>
        <table:table-column table:style-name="co1" table:default-cell-style-name="ce16"/>
        <table:table-column table:style-name="co1" table:number-columns-repeated="3" table:default-cell-style-name="ce143"/>
        <table:table-column table:style-name="co1" table:number-columns-repeated="2" table:default-cell-style-name="ce16"/>
        <table:table-column table:style-name="co1" table:default-cell-style-name="Default"/>
        <table:table-column table:style-name="co1" table:default-cell-style-name="ce16"/>
        <table:table-column table:style-name="co1" table:number-columns-repeated="1637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/>
          <table:table-cell table:style-name="Default"/>
          <table:table-cell table:number-columns-repeated="16373"/>
        </table:table-row>
        <table:table-row table:style-name="ro1">
          <table:table-cell table:number-columns-repeated="2"/>
          <table:table-cell table:style-name="ce156" office:value-type="string" calcext:value-type="string">
            <text:p>RUBRO</text:p>
          </table:table-cell>
          <table:table-cell table:style-name="ce162" office:value-type="float" office:value="0" calcext:value-type="float">
            <text:p>0</text:p>
          </table:table-cell>
          <table:table-cell table:style-name="ce162" table:formula="of:=[.D3]+1" office:value-type="float" office:value="1" calcext:value-type="float">
            <text:p>1</text:p>
          </table:table-cell>
          <table:table-cell table:style-name="ce162" table:formula="of:=[.E3]+1" office:value-type="float" office:value="2" calcext:value-type="float">
            <text:p>2</text:p>
          </table:table-cell>
          <table:table-cell table:style-name="ce162" table:formula="of:=[.F3]+1" office:value-type="float" office:value="3" calcext:value-type="float">
            <text:p>3</text:p>
          </table:table-cell>
          <table:table-cell table:style-name="ce162" table:formula="of:=[.G3]+1" office:value-type="float" office:value="4" calcext:value-type="float">
            <text:p>4</text:p>
          </table:table-cell>
          <table:table-cell table:style-name="ce162" table:formula="of:=[.H3]+1" office:value-type="float" office:value="5" calcext:value-type="float">
            <text:p>5</text:p>
          </table:table-cell>
          <table:table-cell table:style-name="ce162" table:formula="of:=[.I3]+1" office:value-type="float" office:value="6" calcext:value-type="float">
            <text:p>6</text:p>
          </table:table-cell>
          <table:table-cell table:style-name="ce162" table:formula="of:=[.J3]+1" office:value-type="float" office:value="7" calcext:value-type="float">
            <text:p>7</text:p>
          </table:table-cell>
          <table:table-cell table:style-name="ce166" table:formula="of:=[.K3]+1"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57" office:value-type="string" calcext:value-type="string">
            <text:p>Flujo de Caja Económico FCE</text:p>
          </table:table-cell>
          <table:table-cell table:style-name="ce163" table:formula="of:=[$'FC Economico'.N126]" office:value-type="float" office:value="-7576625" calcext:value-type="float">
            <text:p><text:s/>(7,576,625)</text:p>
          </table:table-cell>
          <table:table-cell table:style-name="ce163" table:formula="of:=[$'FC Economico'.O126]" office:value-type="float" office:value="3727110.725" calcext:value-type="float">
            <text:p><text:s/>3,727,111 </text:p>
          </table:table-cell>
          <table:table-cell table:style-name="ce163" table:formula="of:=[$'FC Economico'.P126]" office:value-type="float" office:value="1782668.225" calcext:value-type="float">
            <text:p><text:s/>1,782,668 </text:p>
          </table:table-cell>
          <table:table-cell table:style-name="ce163" table:formula="of:=[$'FC Economico'.Q126]" office:value-type="float" office:value="1782668.225" calcext:value-type="float">
            <text:p><text:s/>1,782,668 </text:p>
          </table:table-cell>
          <table:table-cell table:style-name="ce163" table:formula="of:=[$'FC Economico'.R126]" office:value-type="float" office:value="1466198.225" calcext:value-type="float">
            <text:p><text:s/>1,466,198 </text:p>
          </table:table-cell>
          <table:table-cell table:style-name="ce163" table:formula="of:=[$'FC Economico'.S126]" office:value-type="float" office:value="2637305.225" calcext:value-type="float">
            <text:p><text:s/>2,637,305 </text:p>
          </table:table-cell>
          <table:table-cell table:style-name="ce163" table:formula="of:=[$'FC Economico'.T126]" office:value-type="float" office:value="1508496.525" calcext:value-type="float">
            <text:p><text:s/>1,508,497 </text:p>
          </table:table-cell>
          <table:table-cell table:style-name="ce163" table:formula="of:=[$'FC Economico'.U126]" office:value-type="float" office:value="3355299.835" calcext:value-type="float">
            <text:p><text:s/>3,355,300 </text:p>
          </table:table-cell>
          <table:table-cell table:style-name="ce167" table:formula="of:=[$'FC Economico'.V126]" office:value-type="float" office:value="8742323.535" calcext:value-type="float">
            <text:p><text:s/>8,742,324 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58" office:value-type="string" calcext:value-type="string">
            <text:p>Péstamos</text:p>
          </table:table-cell>
          <table:table-cell table:style-name="ce143" table:formula="of:=[$DEUDA.E3]" office:value-type="float" office:value="2272987.5" calcext:value-type="float">
            <text:p>2272988</text:p>
          </table:table-cell>
          <table:table-cell table:style-name="ce16" table:number-columns-repeated="3"/>
          <table:table-cell table:number-columns-repeated="2"/>
          <table:table-cell table:style-name="ce143"/>
          <table:table-cell/>
          <table:table-cell table:style-name="ce99"/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uota de capital</text:p>
          </table:table-cell>
          <table:table-cell/>
          <table:table-cell table:formula="of:=-[$DEUDA.K6]" office:value-type="float" office:value="-615388.82975955" calcext:value-type="float">
            <text:p>-615389</text:p>
          </table:table-cell>
          <table:table-cell table:formula="of:=-[$DEUDA.L6]" office:value-type="float" office:value="-748119.753825336" calcext:value-type="float">
            <text:p>-748120</text:p>
          </table:table-cell>
          <table:table-cell table:formula="of:=-[$DEUDA.M6]" office:value-type="float" office:value="-909478.916415114" calcext:value-type="float">
            <text:p>-909479</text:p>
          </table:table-cell>
          <table:table-cell table:number-columns-repeated="2"/>
          <table:table-cell table:style-name="ce143"/>
          <table:table-cell/>
          <table:table-cell table:style-name="ce16"/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teres</text:p>
          </table:table-cell>
          <table:table-cell/>
          <table:table-cell table:formula="of:=-[$DEUDA.K7]" office:value-type="float" office:value="-393985.76324999" calcext:value-type="float">
            <text:p>-393986</text:p>
          </table:table-cell>
          <table:table-cell table:formula="of:=-[$DEUDA.L7]" office:value-type="float" office:value="-261254.839184204" calcext:value-type="float">
            <text:p>-261255</text:p>
          </table:table-cell>
          <table:table-cell table:formula="of:=-[$DEUDA.M7]" office:value-type="float" office:value="-99895.6765944258" calcext:value-type="float">
            <text:p>-99896</text:p>
          </table:table-cell>
          <table:table-cell table:number-columns-repeated="2"/>
          <table:table-cell table:style-name="ce16"/>
          <table:table-cell table:style-name="ce143" table:number-columns-repeated="2"/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scudo Fiscal de Intereses</text:p>
          </table:table-cell>
          <table:table-cell/>
          <table:table-cell table:formula="of:=-([.E7]*0.295)" office:value-type="float" office:value="116225.800158747" calcext:value-type="float">
            <text:p>116226</text:p>
          </table:table-cell>
          <table:table-cell table:formula="of:=-([.F7]*0.295)" office:value-type="float" office:value="77070.1775593403" calcext:value-type="float">
            <text:p>77070</text:p>
          </table:table-cell>
          <table:table-cell table:formula="of:=-([.G7]*0.295)" office:value-type="float" office:value="29469.2245953556" calcext:value-type="float">
            <text:p>29469</text:p>
          </table:table-cell>
          <table:table-cell table:number-columns-repeated="2"/>
          <table:table-cell table:style-name="ce16"/>
          <table:table-cell/>
          <table:table-cell table:style-name="ce99"/>
          <table:table-cell table:number-columns-repeated="16372"/>
        </table:table-row>
        <table:table-row table:style-name="ro1">
          <table:table-cell table:number-columns-repeated="2"/>
          <table:table-cell table:style-name="ce160" office:value-type="string" calcext:value-type="string">
            <text:p>Flujo de Caja de la Deuda</text:p>
          </table:table-cell>
          <table:table-cell table:style-name="ce164" table:formula="of:=SUM([.D5:.D8])" office:value-type="float" office:value="2272987.5" calcext:value-type="float">
            <text:p>2272988</text:p>
          </table:table-cell>
          <table:table-cell table:style-name="ce164" table:formula="of:=SUM([.E5:.E8])" office:value-type="float" office:value="-893148.792850793" calcext:value-type="float">
            <text:p>-893149</text:p>
          </table:table-cell>
          <table:table-cell table:style-name="ce164" table:formula="of:=SUM([.F5:.F8])" office:value-type="float" office:value="-932304.4154502" calcext:value-type="float">
            <text:p>-932304</text:p>
          </table:table-cell>
          <table:table-cell table:style-name="ce164" table:formula="of:=SUM([.G5:.G8])" office:value-type="float" office:value="-979905.368414185" calcext:value-type="float">
            <text:p>-979905</text:p>
          </table:table-cell>
          <table:table-cell table:style-name="ce164" table:formula="of:=SUM([.H5:.H8])" office:value-type="float" office:value="0" calcext:value-type="float">
            <text:p>0</text:p>
          </table:table-cell>
          <table:table-cell table:style-name="ce164" table:formula="of:=SUM([.I5:.I8])" office:value-type="float" office:value="0" calcext:value-type="float">
            <text:p>0</text:p>
          </table:table-cell>
          <table:table-cell table:style-name="ce164" table:formula="of:=SUM([.J5:.J8])" office:value-type="float" office:value="0" calcext:value-type="float">
            <text:p>0</text:p>
          </table:table-cell>
          <table:table-cell table:style-name="ce164" table:formula="of:=SUM([.K5:.K8])" office:value-type="float" office:value="0" calcext:value-type="float">
            <text:p>0</text:p>
          </table:table-cell>
          <table:table-cell table:style-name="ce168" table:formula="of:=SUM([.L5:.L8]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61" office:value-type="string" calcext:value-type="string">
            <text:p>Flujo de Caja Financiero</text:p>
          </table:table-cell>
          <table:table-cell table:style-name="ce165" table:formula="of:=[.D4]+[.D9]" office:value-type="float" office:value="-5303637.5" calcext:value-type="float">
            <text:p><text:s/>(5,303,638)</text:p>
          </table:table-cell>
          <table:table-cell table:style-name="ce165" table:formula="of:=[.E4]+[.E9]" office:value-type="float" office:value="2833961.93214921" calcext:value-type="float">
            <text:p><text:s/>2,833,962 </text:p>
          </table:table-cell>
          <table:table-cell table:style-name="ce165" table:formula="of:=[.F4]+[.F9]" office:value-type="float" office:value="850363.8095498" calcext:value-type="float">
            <text:p><text:s/>850,364 </text:p>
          </table:table-cell>
          <table:table-cell table:style-name="ce165" table:formula="of:=[.G4]+[.G9]" office:value-type="float" office:value="802762.856585815" calcext:value-type="float">
            <text:p><text:s/>802,763 </text:p>
          </table:table-cell>
          <table:table-cell table:style-name="ce165" table:formula="of:=[.H4]+[.H9]" office:value-type="float" office:value="1466198.225" calcext:value-type="float">
            <text:p><text:s/>1,466,198 </text:p>
          </table:table-cell>
          <table:table-cell table:style-name="ce165" table:formula="of:=[.I4]+[.I9]" office:value-type="float" office:value="2637305.225" calcext:value-type="float">
            <text:p><text:s/>2,637,305 </text:p>
          </table:table-cell>
          <table:table-cell table:style-name="ce165" table:formula="of:=[.J4]+[.J9]" office:value-type="float" office:value="1508496.525" calcext:value-type="float">
            <text:p><text:s/>1,508,497 </text:p>
          </table:table-cell>
          <table:table-cell table:style-name="ce165" table:formula="of:=[.K4]+[.K9]" office:value-type="float" office:value="3355299.835" calcext:value-type="float">
            <text:p><text:s/>3,355,300 </text:p>
          </table:table-cell>
          <table:table-cell table:style-name="ce169" table:formula="of:=[.L4]+[.L9]" office:value-type="float" office:value="8742323.535" calcext:value-type="float">
            <text:p><text:s/>8,742,324 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rec._20_y_20_VR" style:display-name="PageStyle_Deprec. y V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CD_20_Y_20_FCF" style:display-name="PageStyle_FCD Y FCF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las" style:display-name="PageStyle_Planill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UDA" style:display-name="PageStyle_DEUD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C_20_Economico" style:display-name="PageStyle_FC Economic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P</meta:initial-creator>
    <dc:creator>E. Edison Achalma Mendoza</dc:creator>
    <meta:print-date>2004-10-17T17:01:32</meta:print-date>
    <meta:creation-date>2003-08-13T21:47:24</meta:creation-date>
    <dc:date>2022-05-13T20:37:54</dc:date>
    <meta:generator>LibreOffice/24.2.4.2$Linux_X86_64 LibreOffice_project/420$Build-2</meta:generator>
    <meta:document-statistic meta:table-count="5" meta:cell-count="1048" meta:object-count="0"/>
    <meta:user-defined meta:name="AppVersion">16.0300</meta:user-defined>
    <meta:user-defined meta:name="Company">Universidad del Pacífico</meta:user-defined>
  </office:meta>
</office:document-meta>
</file>