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List_20_Paragraph" style:list-style-name="WWNum1">
      <style:paragraph-properties fo:line-height="200%" fo:text-align="justify" style:justify-single-word="false"/>
    </style:style>
    <style:style style:name="P2" style:family="paragraph" style:parent-style-name="No_20_Spacing">
      <style:paragraph-properties fo:line-height="200%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200%" fo:text-align="justify" style:justify-single-word="false"/>
    </style:style>
    <style:style style:name="T1" style:family="text"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style:font-size-asian="12pt" style:font-name-complex="Arial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N7YwMrI0MrM0NjcyNDZR0lEKTi0uzszPAykwrAUA/v5iCiwAAAA=" text:name="__Grammarly_42___1"/>
      </text:user-field-decls>
      <text:section text:style-name="Sect1" text:name="TextSection">
        <text:p text:style-name="P3" loext:marker-style-name="T2"><text:span text:style-name="T1">CASO: FERTILIZANTES ORGÁNICOS SAC</text:span><text:span text:style-name="T1"/></text:p>
        <text:p text:style-name="P4" loext:marker-style-name="T2"><text:span text:style-name="T3">La empresa Fertilizantes Orgánicos SAC, se dedica a la fabricación y comercialización de un fertilizante químico para el sector agrario. Sin embargo, está estudiando la expansión de las ventas de ese producto a regiones aledañas, para lo cual, dado que tienen su capacidad productiva al máximo, necesitaría llevar a cabo una inversión en maquinaria por valor de S/. 10 millones. El gerente comercial de la empresa, estima que dicha expansión, supondrá elevar las ventas anuales, que actualmente son 25 millones, hasta alcanzar los 45 millones cada uno de los próximos 4 años.</text:span><text:span text:style-name="T3"/></text:p>
        <text:p text:style-name="P4" loext:marker-style-name="T2"><text:span text:style-name="T3">Los costos variables de FOSAC, suponen el 60% de las ventas y están constituidos, en su totalidad, por las compras a proveedores. Los costos fijos, que actualmente son S/. 2.3 millones/año, de los que S/. 1 millón, corresponde a cargos por depreciación, se incrementarán con esta nueva inversión en S/. 1 millón anuales (sin incluir la depreciación). La depreciación de la maquinaria, se llevara a cabo mediante el sistema de línea recta, teniendo ésta, un valor de mercado estimado al finalizar el cuarto año de S/. 2 millones. Las necesidades de capital de trabajo, se estiman en 10% de las ventas incrementales anuales. La tasa impositiva que soporta la empresa es del 35% y la rentabilidad mínima exigida por los accionistas es del 15%. Con esta información se pide:</text:span><text:span text:style-name="T3"/></text:p>
        <text:list text:style-name="WWNum1">
          <text:list-item>
            <text:p text:style-name="P1" loext:marker-style-name="T2"><text:span text:style-name="T3">Flujo de Caja sin proyecto (5 ptos.)</text:span><text:span text:style-name="T3"/></text:p>
          </text:list-item>
          <text:list-item>
            <text:p text:style-name="P1" loext:marker-style-name="T2"><text:span text:style-name="T3">Flujo de Caja con proyecto (6 ptos.)</text:span><text:span text:style-name="T3"/></text:p>
          </text:list-item>
          <text:list-item>
            <text:p text:style-name="P1" loext:marker-style-name="T2"><text:span text:style-name="T3">Flujo de Caja incremental (4 ptos.)</text:span><text:span text:style-name="T3"/></text:p>
          </text:list-item>
          <text:list-item>
            <text:p text:style-name="P1" loext:marker-style-name="T2"><text:span text:style-name="T3">Hallar en VAN incremental e interpretar los resultados. (5 ptos.)</text:span><text:span text:style-name="T3"/></text:p>
          </text:list-item>
        </text:list>
        <text:p text:style-name="P3" loext:marker-style-name="T2"><text:span text:style-name="T1">CASO: FERTILIZANTES ORGÁNICOS SAC</text:span><text:span text:style-name="T1"/></text:p>
        <text:p text:style-name="P4" loext:marker-style-name="T2"><text:span text:style-name="T3">La empresa Fertilizantes Orgánicos SAC, se dedica a la fabricación y comercialización de un fertilizante químico para el sector agrario. Sin embargo, está estudiando la expansión de las ventas de ese producto a regiones aledañas, para lo cual, dado que tienen su capacidad productiva al máximo, necesitaría llevar a cabo una inversión en maquinaria por valor de S/. 10 millones. El gerente comercial de la empresa, estima que dicha expansión, supondrá elevar las ventas anuales, que actualmente son 25 millones, hasta alcanzar los 45 millones cada uno de los próximos 4 años.</text:span><text:span text:style-name="T3"/></text:p>
        <text:p text:style-name="P4" loext:marker-style-name="T2"><text:span text:style-name="T3">Los costos variables de FOSAC, suponen el 60% de las ventas y están constituidos, en su totalidad, por las compras a proveedores. Los costos fijos, que actualmente son S/. 2.3 millones/año, de los que S/. 1 millón, corresponde a cargos por depreciación, se incrementarán con esta nueva inversión en S/. 1 millón anuales (sin incluir la depreciación). La depreciación de la maquinaria, se llevara a cabo mediante el sistema de línea recta, teniendo ésta, un valor de mercado estimado al finalizar el cuarto año de S/. 2 millones. Las necesidades de capital de trabajo, se estiman en 10% de las ventas incrementales anuales. La tasa impositiva que soporta la empresa es del 35% y la rentabilidad mínima exigida por los accionistas es del 15%. Con esta información se pide:</text:span><text:span text:style-name="T3"/></text:p>
        <text:p text:style-name="P2" loext:marker-style-name="T2"><text:span text:style-name="T3">a.) Flujo de Caja sin proyecto (5 ptos.)</text:span><text:span text:style-name="T3"/></text:p>
        <text:p text:style-name="P2" loext:marker-style-name="T2"><text:span text:style-name="T3">b.) Flujo de Caja con proyecto (6 ptos.)</text:span><text:span text:style-name="T3"/></text:p>
        <text:p text:style-name="P2" loext:marker-style-name="T2"><text:span text:style-name="T3">c.) Flujo de Caja incremental (4 ptos.)</text:span><text:span text:style-name="T3"/></text:p>
        <text:p text:style-name="P2" loext:marker-style-name="T2"><text:span text:style-name="T3">d.) Hallar en VAN incremental e interpretar los resultados.(5 ptos.)</text:span><text:span text:style-name="T3"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es" fo:country="PE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es" fo:country="PE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Line_20_Numbering" style:display-name="Line Numbering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)" style:num-suffix=".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9T15:10:00</meta:creation-date>
    <meta:initial-creator>CLIENTE</meta:initial-creator>
    <dc:language>es-PE</dc:language>
    <dc:creator>Elmer Edison Achalma Mendoza</dc:creator>
    <dc:date>2023-12-31T17:40:02</dc:date>
    <meta:editing-cycles>4</meta:editing-cycles>
    <meta:editing-duration>PT1M</meta:editing-duration>
    <meta:generator>LibreOffice/24.2.4.2$Linux_X86_64 LibreOffice_project/420$Build-2</meta:generator>
    <meta:document-statistic meta:table-count="0" meta:image-count="0" meta:object-count="0" meta:page-count="1" meta:paragraph-count="14" meta:word-count="517" meta:character-count="3127" meta:non-whitespace-character-count="2628"/>
    <meta:user-defined meta:name="AppVersion">15.0000</meta:user-defined>
    <meta:template xlink:type="simple" xlink:actuate="onRequest" xlink:title="Normal.dotm" xlink:href=""/>
  </office:meta>
</office:document-meta>
</file>