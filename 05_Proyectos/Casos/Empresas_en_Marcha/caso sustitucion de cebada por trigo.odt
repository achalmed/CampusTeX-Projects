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automatic-styles>
    <style:style style:name="P1" style:family="paragraph" style:parent-style-name="List_20_Paragraph" style:list-style-name="WWNum1">
      <style:paragraph-properties fo:line-height="200%" fo:text-align="justify" style:justify-single-word="false"/>
    </style:style>
    <style:style style:name="P2" style:family="paragraph" style:parent-style-name="No_20_Spacing">
      <style:paragraph-properties fo:line-height="200%" fo:text-align="justify" style:justify-single-word="false"/>
    </style:style>
    <style:style style:name="P3" style:family="paragraph" style:parent-style-name="No_20_Spacing" style:list-style-name="WWNum1">
      <style:paragraph-properties fo:line-height="200%" fo:text-align="justify" style:justify-single-word="false"/>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margin-top="0cm" fo:margin-bottom="0.353cm" style:contextual-spacing="false" fo:line-height="200%" fo:text-align="justify" style:justify-single-word="false"/>
      <style:text-properties style:font-name="Times New Roman" fo:font-size="12pt" style:font-size-asian="12pt" style:font-size-complex="12pt"/>
    </style:style>
    <style:style style:name="T1" style:family="text">
      <style:text-properties style:font-name="Times New Roman" fo:font-size="12pt" style:text-underline-style="solid" style:text-underline-width="auto" style:text-underline-color="font-color" fo:font-weight="bold" style:font-size-asian="12pt" style:font-weight-asian="bold" style:font-name-complex="Arial" style:font-size-complex="12pt"/>
    </style:style>
    <style:style style:name="T2" style:family="text">
      <style:text-properties style:font-name="Times New Roman" fo:font-size="12pt" style:font-size-asian="12pt" style:font-size-complex="12pt"/>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 loext:marker-style-name="T2"><text:span text:style-name="T1">CASO DE SUSTITUCIÓN DE CEDA POR TRIGO</text:span><text:span text:style-name="T1"/></text:p>
        <text:p text:style-name="P2" loext:marker-style-name="T2"><text:span text:style-name="T2">Un agricultor actualmente tiene cultivado el 80% de un predio de 250 Has en cebada, con un rendimiento de 2 TM/Ha/año y vende toda su producción en la región a un precio promedio de US $ 38/TM (precio al productor, en chacra). Los compradores se encargan del transporte del producto comprándolo al agricultor en chacra.</text:span><text:span text:style-name="T2"/></text:p>
        <text:p text:style-name="P2" loext:marker-style-name="T2"><text:span text:style-name="T2">El 20% del predio no está cultivado, porque no cuenta con agua suficiente para mantener el cultivo, esta área no se está utilizando para ningún fin, es decir al agricultor no hace nada en esa porción de su terreno.</text:span><text:span text:style-name="T2"/></text:p>
        <text:p text:style-name="P2" loext:marker-style-name="T2"><text:span text:style-name="T2">El agricultor piensa instalar en su predio un sistema de riego, con el fin de ampliar el área cultivada y para cultivar trigo en lugar de cebada. Ha estudiado el mercado de cereales y considera que puede vender todo el trigo que se produzca en el mercado regional, a un precio (en chacra) de US $ 40.0/TM. Con el riego, se lograra un rendimiento de 1.9 TM de trigo por Ha por año. Con ello alcanzara a cultivar exitosamente en el 90% del predio.</text:span><text:span text:style-name="T2"/></text:p>
        <text:p text:style-name="P2" loext:marker-style-name="T2"><text:span text:style-name="T2">Los insumos y mano de obra necesarios para la producción de una hectárea de cebada tienen un costo de US$ de 46. En el sistema con riego el costo de una hectárea de trigo es de US$ 41 dólares. Todos los activos que el agricultor posee se encuentran totalmente depreciados.</text:span><text:span text:style-name="T2"/></text:p>
        <text:p text:style-name="P2" loext:marker-style-name="T2"><text:span text:style-name="T2">El sistema de riego requiere de una inversión de US $ 10,000 en infraestructura de riego y US $ 14,000 en equipos. Toda la inversión se haría durante el periodo de inversión (año 0), para ingresar a funcionar en la producción de trigo a partir del año 1. Durante el año 0, el agricultor seguirá cultivando cebada, en la misma forma que ha venido haciéndolo: En el 80% del predio y con un rendimiento de 2 TM/Ha/año.</text:span><text:span text:style-name="T2"/></text:p>
        <text:p text:style-name="P2" loext:marker-style-name="T2"><text:span text:style-name="T2">La inversión en infraestructura de riego se deprecia en forma lineal en un plazo de 20 años. El equipo se deprecia en forma lineal en 10 años. El proyecto tiene una vida útil de 5 años.</text:span><text:span text:style-name="T2"/></text:p>
        <text:p text:style-name="P2" loext:marker-style-name="T2"><text:span text:style-name="T2">El agricultor tiene acceso a una línea de financiamiento en la Caja Rural de la Región, para financiar la compra de los equipos, a una TEA igual a 20%, con un periodo de pago de 4 años bajo la modalidad del método alemán.</text:span><text:span text:style-name="T2"/></text:p>
        <text:p text:style-name="P2" loext:marker-style-name="T2"><text:span text:style-name="T2">La tasa de impuesto a la renta en las zonas de producción de trigo y cebada es igual al 20%. La inflación promedio anual para el horizonte de evaluación es del 3%. Con esta información se pide: </text:span><text:span text:style-name="T2"/></text:p>
        <text:list text:style-name="WWNum1">
          <text:list-item>
            <text:p text:style-name="P3" loext:marker-style-name="T2"><text:span text:style-name="T2">Construya el Estado de Resultados y Flujo de Caja Económico sin proyecto (5 ptos.) </text:span><text:span text:style-name="T2"/></text:p>
          </text:list-item>
          <text:list-item>
            <text:p text:style-name="P3" loext:marker-style-name="T2"><text:span text:style-name="T2">Construya el Estado de Resultado y Flujo de Caja Económico y Financiero con proyecto (8 ptos.)</text:span><text:span text:style-name="T2"/></text:p>
          </text:list-item>
          <text:list-item>
            <text:p text:style-name="P1" loext:marker-style-name="T2"><text:span text:style-name="T2">Construya el Flujo de Caja Económico Incremental (3 ptos)</text:span><text:span text:style-name="T2"/></text:p>
          </text:list-item>
        </text:list>
        <text:p text:style-name="P5" loext:marker-style-name="T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E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List_20_Paragraph" style:display-name="List Paragraph" style:family="paragraph" style:parent-style-name="Standard">
      <style:paragraph-properties fo:margin-left="1.27cm" fo:margin-top="0cm" fo:margin-bottom="0.353cm" style:contextual-spacing="true"/>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E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0T18:05:00</meta:creation-date>
    <meta:initial-creator>TONY HINOJOZA</meta:initial-creator>
    <dc:language>es-PE</dc:language>
    <dc:creator>Elmer Edison Achalma Mendoza</dc:creator>
    <dc:date>2023-12-31T17:40:05</dc:date>
    <meta:editing-cycles>3</meta:editing-cycles>
    <meta:editing-duration>PT2M</meta:editing-duration>
    <meta:generator>LibreOffice/24.2.4.2$Linux_X86_64 LibreOffice_project/420$Build-2</meta:generator>
    <meta:document-statistic meta:table-count="0" meta:image-count="0" meta:object-count="0" meta:page-count="1" meta:paragraph-count="12" meta:word-count="470" meta:character-count="2545" meta:non-whitespace-character-count="2088"/>
    <meta:user-defined meta:name="AppVersion">15.0000</meta:user-defined>
    <meta:template xlink:type="simple" xlink:actuate="onRequest" xlink:title="Normal" xlink:href=""/>
  </office:meta>
</office:document-meta>
</file>