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5.846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2.965cm"/>
    </style:style>
    <style:style style:name="co10" style:family="table-column">
      <style:table-column-properties fo:break-before="auto" style:column-width="1.69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lujo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tru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cc99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ffcc99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0.74pt solid #000000" style:rotation-align="none"/>
    </style:style>
    <style:style style:name="ce32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34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34">
      <style:table-cell-properties style:diagonal-bl-tr="none" style:diagonal-tl-br="none" fo:border="0.74pt solid #000000" style:rotation-align="non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1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36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3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33">
      <style:table-cell-properties fo:border-bottom="1.76pt solid #000000" fo:background-color="#ffcc99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33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0">
      <style:table-cell-properties style:rotation-align="none"/>
    </style:style>
    <style:style style:name="ce61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3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7" style:family="table-cell" style:parent-style-name="Excel_20_Built-in_20_Comma" style:data-style-name="N134">
      <style:table-cell-properties fo:border-bottom="1.76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38">
      <style:table-cell-properties style:diagonal-bl-tr="none" style:diagonal-tl-br="none" fo:border="0.74pt solid #000000" style:rotation-align="none"/>
    </style:style>
    <style:style style:name="ce70" style:family="table-cell" style:parent-style-name="Default" style:data-style-name="N135">
      <style:table-cell-properties style:diagonal-bl-tr="none" style:diagonal-tl-br="none" fo:border="0.74pt solid #000000" style:rotation-align="none"/>
    </style:style>
    <style:style style:name="ce71" style:family="table-cell" style:parent-style-name="Default" style:data-style-name="N135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13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39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3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35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137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135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38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88" style:family="table-cell" style:parent-style-name="Excel_20_Built-in_20_Comma" style:data-style-name="N134">
      <style:table-cell-properties fo:border-bottom="1.76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 style:data-style-name="N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33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none" style:rotation-align="none"/>
    </style:style>
    <style:style style:name="ce100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uj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46" table:default-cell-style-name="Default"/>
        <table:table-column table:style-name="co10" table:number-columns-repeated="16128" table:default-cell-style-name="Default"/>
        <table:table-row table:style-name="ro1">
          <table:table-cell/>
          <table:table-cell table:style-name="Default"/>
          <table:table-cell/>
          <table:table-cell table:style-name="ce1"/>
          <table:table-cell table:number-columns-repeated="16380"/>
        </table:table-row>
        <table:table-row table:style-name="ro2">
          <table:table-cell/>
          <table:table-cell table:style-name="Default"/>
          <table:table-cell/>
          <table:table-cell table:style-name="ce66" office:value-type="string" calcext:value-type="string">
            <text:p>FABRICA DE TABLETAS PARA PISOS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A. PROYECTO DESAPALANCADO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Programa de Ventas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RUBRO</text:p>
          </table:table-cell>
          <table:table-cell table:style-name="ce30" office:value-type="string" calcext:value-type="string">
            <text:p>AÑO 0</text:p>
          </table:table-cell>
          <table:table-cell table:style-name="ce30" office:value-type="string" calcext:value-type="string">
            <text:p>AÑO 1</text:p>
          </table:table-cell>
          <table:table-cell table:style-name="ce30" office:value-type="string" calcext:value-type="string">
            <text:p>AÑO 2</text:p>
          </table:table-cell>
          <table:table-cell table:style-name="ce30" office:value-type="string" calcext:value-type="string">
            <text:p>AÑO 3</text:p>
          </table:table-cell>
          <table:table-cell table:style-name="ce30" office:value-type="string" calcext:value-type="string">
            <text:p>AÑO 4</text:p>
          </table:table-cell>
          <table:table-cell table:style-name="ce86" office:value-type="string" calcext:value-type="string">
            <text:p>AÑO 5</text:p>
          </table:table-cell>
          <table:table-cell table:style-name="ce98"/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Producción m2 anuales</text:p>
          </table:table-cell>
          <table:table-cell table:style-name="ce31"/>
          <table:table-cell table:style-name="ce31" office:value-type="float" office:value="8000" calcext:value-type="float">
            <text:p>8000</text:p>
          </table:table-cell>
          <table:table-cell table:style-name="ce31" table:formula="of:=+[.D8]*2" office:value-type="float" office:value="16000" calcext:value-type="float">
            <text:p>16000</text:p>
          </table:table-cell>
          <table:table-cell table:number-columns-repeated="2" table:style-name="ce31" office:value-type="float" office:value="16000" calcext:value-type="float">
            <text:p>16000</text:p>
          </table:table-cell>
          <table:table-cell table:style-name="ce87" office:value-type="float" office:value="16000" calcext:value-type="float">
            <text:p>16000</text:p>
          </table:table-cell>
          <table:table-cell table:style-name="ce99"/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Precio de venta (por m2)</text:p>
          </table:table-cell>
          <table:table-cell table:style-name="ce31"/>
          <table:table-cell table:number-columns-repeated="5" table:style-name="ce31" office:value-type="float" office:value="150" calcext:value-type="float">
            <text:p>150</text:p>
          </table:table-cell>
          <table:table-cell table:style-name="ce99"/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Ingreso por ventas</text:p>
          </table:table-cell>
          <table:table-cell table:style-name="ce32"/>
          <table:table-cell table:style-name="ce67" table:formula="of:=[.D8]*[.D9]" office:value-type="float" office:value="1200000" calcext:value-type="float">
            <text:p><text:s/>1,200,000 </text:p>
          </table:table-cell>
          <table:table-cell table:style-name="ce67" table:formula="of:=[.E8]*[.E9]" office:value-type="float" office:value="2400000" calcext:value-type="float">
            <text:p><text:s/>2,400,000 </text:p>
          </table:table-cell>
          <table:table-cell table:style-name="ce67" table:formula="of:=[.F8]*[.F9]" office:value-type="float" office:value="2400000" calcext:value-type="float">
            <text:p><text:s/>2,400,000 </text:p>
          </table:table-cell>
          <table:table-cell table:style-name="ce67" table:formula="of:=[.G8]*[.G9]" office:value-type="float" office:value="2400000" calcext:value-type="float">
            <text:p><text:s/>2,400,000 </text:p>
          </table:table-cell>
          <table:table-cell table:style-name="ce88" table:formula="of:=[.H8]*[.H9]" office:value-type="float" office:value="2400000" calcext:value-type="float">
            <text:p><text:s/>2,400,000 </text:p>
          </table:table-cell>
          <table:table-cell table:style-name="ce99"/>
          <table:table-cell table:number-columns-repeated="16375"/>
        </table:table-row>
        <table:table-row table:style-name="ro1">
          <table:table-cell/>
          <table:table-cell table:style-name="ce6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resupuesto de Inversion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Activos</text:p>
          </table:table-cell>
          <table:table-cell table:style-name="ce8" office:value-type="string" calcext:value-type="string">
            <text:p>Año 0 </text:p>
          </table:table-cell>
          <table:table-cell table:style-name="ce8" office:value-type="string" calcext:value-type="string">
            <text:p>Año 1</text:p>
          </table:table-cell>
          <table:table-cell table:number-columns-repeated="16380"/>
        </table:table-row>
        <table:table-row table:style-name="ro1">
          <table:table-cell/>
          <table:table-cell table:style-name="ce9" office:value-type="string" calcext:value-type="string">
            <text:p>Adquisicon de terrenos</text:p>
          </table:table-cell>
          <table:table-cell table:style-name="ce33" office:value-type="float" office:value="300000" calcext:value-type="float">
            <text:p><text:s/>300,000 </text:p>
          </table:table-cell>
          <table:table-cell table:style-name="ce31"/>
          <table:table-cell table:number-columns-repeated="16380"/>
        </table:table-row>
        <table:table-row table:style-name="ro1">
          <table:table-cell/>
          <table:table-cell table:style-name="ce9" office:value-type="string" calcext:value-type="string">
            <text:p>Construccion de edificios</text:p>
          </table:table-cell>
          <table:table-cell table:style-name="ce33" office:value-type="float" office:value="1700000" calcext:value-type="float">
            <text:p><text:s/>1,700,000 </text:p>
          </table:table-cell>
          <table:table-cell table:style-name="ce31"/>
          <table:table-cell table:number-columns-repeated="16380"/>
        </table:table-row>
        <table:table-row table:style-name="ro1">
          <table:table-cell/>
          <table:table-cell table:style-name="ce9" office:value-type="string" calcext:value-type="string">
            <text:p>Adquisicion de equipos</text:p>
          </table:table-cell>
          <table:table-cell table:style-name="ce33" office:value-type="float" office:value="3000000" calcext:value-type="float">
            <text:p><text:s/>3,000,000 </text:p>
          </table:table-cell>
          <table:table-cell table:style-name="ce68" office:value-type="float" office:value="1000000" calcext:value-type="float">
            <text:p><text:s/>1,000,000 </text:p>
          </table:table-cell>
          <table:table-cell table:number-columns-repeated="16380"/>
        </table:table-row>
        <table:table-row table:style-name="ro1">
          <table:table-cell/>
          <table:table-cell table:style-name="ce9" office:value-type="string" calcext:value-type="string">
            <text:p>Estudios previos</text:p>
          </table:table-cell>
          <table:table-cell table:style-name="ce33" office:value-type="float" office:value="300000" calcext:value-type="float">
            <text:p><text:s/>300,000 </text:p>
          </table:table-cell>
          <table:table-cell table:style-name="ce68"/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Total inversion Fija</text:p>
          </table:table-cell>
          <table:table-cell table:style-name="ce34" table:formula="of:=SUM([.C14:.C17])" office:value-type="float" office:value="5300000" calcext:value-type="float">
            <text:p><text:s/>5,300,000 </text:p>
          </table:table-cell>
          <table:table-cell table:style-name="ce14" table:formula="of:=SUM([.D14:.D16])" office:value-type="float" office:value="1000000" calcext:value-type="float">
            <text:p>1000000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Capital de trabajo</text:p>
          </table:table-cell>
          <table:table-cell table:style-name="ce33" office:value-type="float" office:value="300000" calcext:value-type="float">
            <text:p><text:s/>300,000 </text:p>
          </table:table-cell>
          <table:table-cell table:style-name="ce13" office:value-type="float" office:value="600000" calcext:value-type="float">
            <text:p>600000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Total Capital de Trabajo</text:p>
          </table:table-cell>
          <table:table-cell table:style-name="ce34" table:formula="of:=[.C19]" office:value-type="float" office:value="300000" calcext:value-type="float">
            <text:p><text:s/>300,000 </text:p>
          </table:table-cell>
          <table:table-cell table:style-name="ce34" table:formula="of:=[.D19]" office:value-type="float" office:value="600000" calcext:value-type="float">
            <text:p><text:s/>600,000 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Total inversion </text:p>
          </table:table-cell>
          <table:table-cell table:style-name="ce35" table:formula="of:=[.C18]+[.C20]" office:value-type="float" office:value="5600000" calcext:value-type="float">
            <text:p><text:s/>5,600,000 </text:p>
          </table:table-cell>
          <table:table-cell table:style-name="ce35" table:formula="of:=[.D18]+[.D20]" office:value-type="float" office:value="1600000" calcext:value-type="float">
            <text:p><text:s/>1,600,000 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Tabla de Depreciaciones nominal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Activos</text:p>
          </table:table-cell>
          <table:table-cell table:style-name="ce8" office:value-type="string" calcext:value-type="string">
            <text:p>Vc</text:p>
          </table:table-cell>
          <table:table-cell table:style-name="ce8" office:value-type="string" calcext:value-type="string">
            <text:p>Vida util</text:p>
          </table:table-cell>
          <table:table-cell table:style-name="ce8" office:value-type="string" calcext:value-type="string">
            <text:p>Dep/año 1</text:p>
          </table:table-cell>
          <table:table-cell table:style-name="ce8" office:value-type="string" calcext:value-type="string">
            <text:p>Dep/año2</text:p>
          </table:table-cell>
          <table:table-cell table:style-name="ce8" office:value-type="string" calcext:value-type="string">
            <text:p>Dep Acum</text:p>
          </table:table-cell>
          <table:table-cell table:style-name="ce8" office:value-type="string" calcext:value-type="string">
            <text:p>Valor Cont.</text:p>
          </table:table-cell>
          <table:table-cell table:style-name="ce8" office:value-type="string" calcext:value-type="string">
            <text:p>Valor Merc.</text:p>
          </table:table-cell>
          <table:table-cell table:style-name="ce8" office:value-type="string" calcext:value-type="string">
            <text:p>Utilidad/perdida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Edificaciones</text:p>
          </table:table-cell>
          <table:table-cell table:style-name="ce36" table:formula="of:=[.C15]" office:value-type="float" office:value="1700000" calcext:value-type="float">
            <text:p><text:s/>1,700,000 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[.C25]*(1/[.D25])" office:value-type="float" office:value="85000" calcext:value-type="float">
            <text:p>85000</text:p>
          </table:table-cell>
          <table:table-cell table:style-name="ce31" table:formula="of:=[.E25]" office:value-type="float" office:value="85000" calcext:value-type="float">
            <text:p>85000</text:p>
          </table:table-cell>
          <table:table-cell table:style-name="ce31" table:formula="of:=[.F25]*5" office:value-type="float" office:value="425000" calcext:value-type="float">
            <text:p>425000</text:p>
          </table:table-cell>
          <table:table-cell table:style-name="ce36" table:formula="of:=[.C25]-[.G25]" office:value-type="float" office:value="1275000" calcext:value-type="float">
            <text:p><text:s/>1,275,000 </text:p>
          </table:table-cell>
          <table:table-cell table:style-name="ce33" office:value-type="float" office:value="2500000" calcext:value-type="float">
            <text:p><text:s/>2,500,000 </text:p>
          </table:table-cell>
          <table:table-cell table:style-name="ce36" table:formula="of:=[.I25]-[.H25]" office:value-type="float" office:value="1225000" calcext:value-type="float">
            <text:p><text:s/>1,225,000 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Equipos año 0</text:p>
          </table:table-cell>
          <table:table-cell table:style-name="ce36" table:formula="of:=[.C16]" office:value-type="float" office:value="3000000" calcext:value-type="float">
            <text:p><text:s/>3,000,000 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formula="of:=[.C26]*(1/[.D26])" office:value-type="float" office:value="300000" calcext:value-type="float">
            <text:p>300000</text:p>
          </table:table-cell>
          <table:table-cell table:style-name="ce31" table:formula="of:=[.E26]" office:value-type="float" office:value="300000" calcext:value-type="float">
            <text:p>300000</text:p>
          </table:table-cell>
          <table:table-cell table:style-name="ce31" table:formula="of:=[.F26]*5" office:value-type="float" office:value="1500000" calcext:value-type="float">
            <text:p>1500000</text:p>
          </table:table-cell>
          <table:table-cell table:style-name="ce36" table:formula="of:=[.C26]-[.G26]" office:value-type="float" office:value="1500000" calcext:value-type="float">
            <text:p><text:s/>1,500,000 </text:p>
          </table:table-cell>
          <table:table-cell table:style-name="ce100" office:value-type="float" office:value="600000" calcext:value-type="float" table:number-columns-spanned="1" table:number-rows-spanned="2">
            <text:p><text:s/>600,000 </text:p>
          </table:table-cell>
          <table:table-cell table:style-name="ce103" table:formula="of:=[.I26]-[.H26]-[.H27]" office:value-type="float" office:value="-1500000" calcext:value-type="float" table:number-columns-spanned="1" table:number-rows-spanned="2">
            <text:p><text:s/>(1,500,000)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Equipos año 1</text:p>
          </table:table-cell>
          <table:table-cell table:style-name="ce33" office:value-type="float" office:value="1000000" calcext:value-type="float">
            <text:p><text:s/>1,000,000 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7]*(1/[.D27])" office:value-type="float" office:value="100000" calcext:value-type="float">
            <text:p>100000</text:p>
          </table:table-cell>
          <table:table-cell table:style-name="ce31" table:formula="of:=[.F27]*4" office:value-type="float" office:value="400000" calcext:value-type="float">
            <text:p>400000</text:p>
          </table:table-cell>
          <table:table-cell table:style-name="ce36" table:formula="of:=[.C27]-[.G27]" office:value-type="float" office:value="600000" calcext:value-type="float">
            <text:p><text:s/>600,000 </text:p>
          </table:table-cell>
          <table:covered-table-cell table:style-name="ce101"/>
          <table:covered-table-cell table:style-name="ce104"/>
          <table:table-cell table:number-columns-repeated="16374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8" table:number-columns-repeated="2"/>
          <table:table-cell table:style-name="ce8" table:formula="of:=SUM([.E25:.E27])" office:value-type="float" office:value="385000" calcext:value-type="float">
            <text:p>385000</text:p>
          </table:table-cell>
          <table:table-cell table:style-name="ce8" table:formula="of:=SUM([.F25:.F27])" office:value-type="float" office:value="485000" calcext:value-type="float">
            <text:p>485000</text:p>
          </table:table-cell>
          <table:table-cell table:style-name="ce8" table:number-columns-repeated="3"/>
          <table:table-cell table:style-name="ce35" table:formula="of:=[.J25]+[.J26]" office:value-type="float" office:value="-275000" calcext:value-type="float">
            <text:p><text:s/>(275,000)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 table:number-columns-spanned="7" table:number-rows-spanned="1">
            <text:p>ESTADO DE GANANCIAS Y PERDIDAS</text:p>
          </table:table-cell>
          <table:covered-table-cell table:number-columns-repeated="6" table:style-name="ce37"/>
          <table:table-cell table:number-columns-repeated="16376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1" office:value-type="string" calcext:value-type="string">
            <text:p>RUBRO</text:p>
          </table:table-cell>
          <table:table-cell table:style-name="ce11"/>
          <table:table-cell table:style-name="ce11" office:value-type="string" calcext:value-type="string">
            <text:p>Año 1</text:p>
          </table:table-cell>
          <table:table-cell table:style-name="ce11" office:value-type="string" calcext:value-type="string">
            <text:p>Año 2</text:p>
          </table:table-cell>
          <table:table-cell table:style-name="ce11" office:value-type="string" calcext:value-type="string">
            <text:p>Año 3</text:p>
          </table:table-cell>
          <table:table-cell table:style-name="ce11" office:value-type="string" calcext:value-type="string">
            <text:p>Año 4</text:p>
          </table:table-cell>
          <table:table-cell table:style-name="ce11" office:value-type="string" calcext:value-type="string">
            <text:p>Añ0 5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Ventas netas</text:p>
          </table:table-cell>
          <table:table-cell table:style-name="ce36"/>
          <table:table-cell table:style-name="ce36" table:formula="of:=[.D10]" office:value-type="float" office:value="1200000" calcext:value-type="float">
            <text:p><text:s/>1,200,000 </text:p>
          </table:table-cell>
          <table:table-cell table:style-name="ce36" table:formula="of:=[.E10]" office:value-type="float" office:value="2400000" calcext:value-type="float">
            <text:p><text:s/>2,400,000 </text:p>
          </table:table-cell>
          <table:table-cell table:style-name="ce36" table:formula="of:=[.F10]" office:value-type="float" office:value="2400000" calcext:value-type="float">
            <text:p><text:s/>2,400,000 </text:p>
          </table:table-cell>
          <table:table-cell table:style-name="ce36" table:formula="of:=[.G10]" office:value-type="float" office:value="2400000" calcext:value-type="float">
            <text:p><text:s/>2,400,000 </text:p>
          </table:table-cell>
          <table:table-cell table:style-name="ce36" table:formula="of:=[.H10]" office:value-type="float" office:value="2400000" calcext:value-type="float">
            <text:p><text:s/>2,400,000 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Mano de obra</text:p>
          </table:table-cell>
          <table:table-cell table:style-name="ce31"/>
          <table:table-cell table:style-name="ce31" office:value-type="float" office:value="-75000" calcext:value-type="float">
            <text:p>-75000</text:p>
          </table:table-cell>
          <table:table-cell table:number-columns-repeated="4" table:style-name="ce31" office:value-type="float" office:value="-150000" calcext:value-type="float">
            <text:p>-150000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Materia prima y combustible</text:p>
          </table:table-cell>
          <table:table-cell table:style-name="ce31"/>
          <table:table-cell table:style-name="ce31" office:value-type="float" office:value="-90000" calcext:value-type="float">
            <text:p>-90000</text:p>
          </table:table-cell>
          <table:table-cell table:number-columns-repeated="4" table:style-name="ce31" office:value-type="float" office:value="-180000" calcext:value-type="float">
            <text:p>-180000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Mantenimiento y repuestos</text:p>
          </table:table-cell>
          <table:table-cell table:style-name="ce31"/>
          <table:table-cell table:style-name="ce31" office:value-type="float" office:value="-15000" calcext:value-type="float">
            <text:p>-15000</text:p>
          </table:table-cell>
          <table:table-cell table:number-columns-repeated="4" table:style-name="ce31" office:value-type="float" office:value="-30000" calcext:value-type="float">
            <text:p>-30000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Otros gastos de operación</text:p>
          </table:table-cell>
          <table:table-cell table:style-name="ce31"/>
          <table:table-cell table:style-name="ce31" office:value-type="float" office:value="-15000" calcext:value-type="float">
            <text:p>-15000</text:p>
          </table:table-cell>
          <table:table-cell table:style-name="ce31" table:formula="of:=-30000" office:value-type="float" office:value="-30000" calcext:value-type="float">
            <text:p>-30000</text:p>
          </table:table-cell>
          <table:table-cell table:style-name="ce31" table:formula="of:=-30000" office:value-type="float" office:value="-30000" calcext:value-type="float">
            <text:p>-30000</text:p>
          </table:table-cell>
          <table:table-cell table:style-name="ce31" table:formula="of:=-30000" office:value-type="float" office:value="-30000" calcext:value-type="float">
            <text:p>-30000</text:p>
          </table:table-cell>
          <table:table-cell table:style-name="ce31" table:formula="of:=-30000" office:value-type="float" office:value="-30000" calcext:value-type="float">
            <text:p>-30000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Depreciaciones</text:p>
          </table:table-cell>
          <table:table-cell table:style-name="ce31"/>
          <table:table-cell table:style-name="ce69" table:formula="of:=-[.$E$28]*[.D50]" office:value-type="float" office:value="-373786.40776699" calcext:value-type="float">
            <text:p><text:s/>-373,786 </text:p>
          </table:table-cell>
          <table:table-cell table:style-name="ce69" table:formula="of:=-[.$E$28]*[.E50]" office:value-type="float" office:value="-362899.425016495" calcext:value-type="float">
            <text:p><text:s/>-362,899 </text:p>
          </table:table-cell>
          <table:table-cell table:style-name="ce69" table:formula="of:=-[.$E$28]*[.F50]" office:value-type="float" office:value="-352329.538850966" calcext:value-type="float">
            <text:p><text:s/>-352,330 </text:p>
          </table:table-cell>
          <table:table-cell table:style-name="ce69" table:formula="of:=-[.$E$28]*[.G50]" office:value-type="float" office:value="-342067.51344754" calcext:value-type="float">
            <text:p><text:s/>-342,068 </text:p>
          </table:table-cell>
          <table:table-cell table:style-name="ce69" table:formula="of:=-[.$E$28]*[.H50]" office:value-type="float" office:value="-332104.381987903" calcext:value-type="float">
            <text:p><text:s/>-332,104 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Amoritzacion Intangibles</text:p>
          </table:table-cell>
          <table:table-cell table:style-name="ce31"/>
          <table:table-cell table:style-name="ce69" table:formula="of:=-[.$C$17]/5*[.D50]" office:value-type="float" office:value="-58252.427184466" calcext:value-type="float">
            <text:p><text:s/>-58,252 </text:p>
          </table:table-cell>
          <table:table-cell table:style-name="ce69" table:formula="of:=-[.$C$17]/5*[.E50]" office:value-type="float" office:value="-56555.7545480253" calcext:value-type="float">
            <text:p><text:s/>-56,556 </text:p>
          </table:table-cell>
          <table:table-cell table:style-name="ce69" table:formula="of:=-[.$C$17]/5*[.F50]" office:value-type="float" office:value="-54908.4995611896" calcext:value-type="float">
            <text:p><text:s/>-54,908 </text:p>
          </table:table-cell>
          <table:table-cell table:style-name="ce69" table:formula="of:=-[.$C$17]/5*[.G50]" office:value-type="float" office:value="-53309.2228749413" calcext:value-type="float">
            <text:p><text:s/>-53,309 </text:p>
          </table:table-cell>
          <table:table-cell table:style-name="ce69" table:formula="of:=-[.$C$17]/5*[.H50]" office:value-type="float" office:value="-51756.5270630499" calcext:value-type="float">
            <text:p><text:s/>-51,757 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Utilidad por venta de edificios</text:p>
          </table:table-cell>
          <table:table-cell table:style-name="ce31" table:number-columns-repeated="5"/>
          <table:table-cell table:style-name="ce36" table:formula="of:=[.J25]" office:value-type="float" office:value="1225000" calcext:value-type="float">
            <text:p><text:s/>1,225,000 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Perdida en la venta de equipos</text:p>
          </table:table-cell>
          <table:table-cell table:style-name="ce31"/>
          <table:table-cell table:style-name="ce36"/>
          <table:table-cell table:style-name="ce31" table:number-columns-repeated="3"/>
          <table:table-cell table:style-name="ce36" table:formula="of:=[.J26]" office:value-type="float" office:value="-1500000" calcext:value-type="float">
            <text:p><text:s/>(1,500,000)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Utilidad Bruta</text:p>
          </table:table-cell>
          <table:table-cell table:style-name="ce14"/>
          <table:table-cell table:style-name="ce34" table:formula="of:=SUM([.D34:.D42])" office:value-type="float" office:value="572961.165048544" calcext:value-type="float">
            <text:p><text:s/>572,961 </text:p>
          </table:table-cell>
          <table:table-cell table:style-name="ce34" table:formula="of:=SUM([.E34:.E42])" office:value-type="float" office:value="1590544.82043548" calcext:value-type="float">
            <text:p><text:s/>1,590,545 </text:p>
          </table:table-cell>
          <table:table-cell table:style-name="ce34" table:formula="of:=SUM([.F34:.F42])" office:value-type="float" office:value="1602761.96158784" calcext:value-type="float">
            <text:p><text:s/>1,602,762 </text:p>
          </table:table-cell>
          <table:table-cell table:style-name="ce34" table:formula="of:=SUM([.G34:.G42])" office:value-type="float" office:value="1614623.26367752" calcext:value-type="float">
            <text:p><text:s/>1,614,623 </text:p>
          </table:table-cell>
          <table:table-cell table:style-name="ce34" table:formula="of:=SUM([.H34:.H42])" office:value-type="float" office:value="1351139.09094905" calcext:value-type="float">
            <text:p><text:s/>1,351,139 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Costos de Administracion</text:p>
          </table:table-cell>
          <table:table-cell table:style-name="ce31"/>
          <table:table-cell table:style-name="ce31" office:value-type="float" office:value="-75000" calcext:value-type="float">
            <text:p>-75000</text:p>
          </table:table-cell>
          <table:table-cell table:number-columns-repeated="4" table:style-name="ce31" office:value-type="float" office:value="-150000" calcext:value-type="float">
            <text:p>-150000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Publicidad y Ventas</text:p>
          </table:table-cell>
          <table:table-cell table:style-name="ce31"/>
          <table:table-cell table:style-name="ce31" office:value-type="float" office:value="-30000" calcext:value-type="float">
            <text:p>-30000</text:p>
          </table:table-cell>
          <table:table-cell table:number-columns-repeated="4" table:style-name="ce31" office:value-type="float" office:value="-60000" calcext:value-type="float">
            <text:p>-60000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Utilidad Imponible</text:p>
          </table:table-cell>
          <table:table-cell table:style-name="ce14"/>
          <table:table-cell table:style-name="ce34" table:formula="of:=SUM([.D43:.D45])" office:value-type="float" office:value="467961.165048544" calcext:value-type="float">
            <text:p><text:s/>467,961 </text:p>
          </table:table-cell>
          <table:table-cell table:style-name="ce34" table:formula="of:=SUM([.E43:.E45])" office:value-type="float" office:value="1380544.82043548" calcext:value-type="float">
            <text:p><text:s/>1,380,545 </text:p>
          </table:table-cell>
          <table:table-cell table:style-name="ce34" table:formula="of:=SUM([.F43:.F45])" office:value-type="float" office:value="1392761.96158784" calcext:value-type="float">
            <text:p><text:s/>1,392,762 </text:p>
          </table:table-cell>
          <table:table-cell table:style-name="ce34" table:formula="of:=SUM([.G43:.G45])" office:value-type="float" office:value="1404623.26367752" calcext:value-type="float">
            <text:p><text:s/>1,404,623 </text:p>
          </table:table-cell>
          <table:table-cell table:style-name="ce34" table:formula="of:=SUM([.H43:.H45])" office:value-type="float" office:value="1141139.09094905" calcext:value-type="float">
            <text:p><text:s/>1,141,139 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Impuestos (15%)</text:p>
          </table:table-cell>
          <table:table-cell table:style-name="ce31"/>
          <table:table-cell table:style-name="ce70" table:formula="of:=-[.D46]*0.15" office:value-type="float" office:value="-70194.1747572815" calcext:value-type="float">
            <text:p><text:s/>-70,194.2 </text:p>
          </table:table-cell>
          <table:table-cell table:style-name="ce70" table:formula="of:=-[.E46]*0.15" office:value-type="float" office:value="-207081.723065322" calcext:value-type="float">
            <text:p><text:s/>-207,081.7 </text:p>
          </table:table-cell>
          <table:table-cell table:style-name="ce70" table:formula="of:=-[.F46]*0.15" office:value-type="float" office:value="-208914.294238177" calcext:value-type="float">
            <text:p><text:s/>-208,914.3 </text:p>
          </table:table-cell>
          <table:table-cell table:style-name="ce70" table:formula="of:=-[.G46]*0.15" office:value-type="float" office:value="-210693.489551628" calcext:value-type="float">
            <text:p><text:s/>-210,693.5 </text:p>
          </table:table-cell>
          <table:table-cell table:style-name="ce70" table:formula="of:=-[.H46]*0.15" office:value-type="float" office:value="-171170.863642357" calcext:value-type="float">
            <text:p><text:s/>-171,170.9 </text:p>
          </table:table-cell>
          <table:table-cell table:number-columns-repeated="16376"/>
        </table:table-row>
        <table:table-row table:style-name="ro1">
          <table:table-cell/>
          <table:table-cell table:style-name="ce8" office:value-type="string" calcext:value-type="string">
            <text:p>Utlidad Neta</text:p>
          </table:table-cell>
          <table:table-cell table:style-name="ce8"/>
          <table:table-cell table:style-name="ce71" table:formula="of:=[.D46]+[.D47]" office:value-type="float" office:value="397766.990291262" calcext:value-type="float">
            <text:p><text:s/>397,767.0 </text:p>
          </table:table-cell>
          <table:table-cell table:style-name="ce71" table:formula="of:=[.E46]+[.E47]" office:value-type="float" office:value="1173463.09737016" calcext:value-type="float">
            <text:p><text:s/>1,173,463.1 </text:p>
          </table:table-cell>
          <table:table-cell table:style-name="ce71" table:formula="of:=[.F46]+[.F47]" office:value-type="float" office:value="1183847.66734967" calcext:value-type="float">
            <text:p><text:s/>1,183,847.7 </text:p>
          </table:table-cell>
          <table:table-cell table:style-name="ce71" table:formula="of:=[.G46]+[.G47]" office:value-type="float" office:value="1193929.77412589" calcext:value-type="float">
            <text:p><text:s/>1,193,929.8 </text:p>
          </table:table-cell>
          <table:table-cell table:style-name="ce71" table:formula="of:=[.H46]+[.H47]" office:value-type="float" office:value="969968.22730669" calcext:value-type="float">
            <text:p><text:s/>969,968.2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7"/>
          <table:table-cell table:style-name="ce7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actor de Actualizacion</text:p>
          </table:table-cell>
          <table:table-cell table:style-name="ce7"/>
          <table:table-cell table:style-name="ce73" table:formula="of:=1/POWER(1.03;1)" office:value-type="float" office:value="0.970873786407767" calcext:value-type="float">
            <text:p><text:s/>0.9709 </text:p>
          </table:table-cell>
          <table:table-cell table:style-name="ce73" table:formula="of:=1/POWER(1.03;2)" office:value-type="float" office:value="0.942595909133754" calcext:value-type="float">
            <text:p><text:s/>0.9426 </text:p>
          </table:table-cell>
          <table:table-cell table:style-name="ce73" table:formula="of:=1/POWER(1.03;3)" office:value-type="float" office:value="0.91514165935316" calcext:value-type="float">
            <text:p><text:s/>0.9151 </text:p>
          </table:table-cell>
          <table:table-cell table:style-name="ce73" table:formula="of:=1/POWER(1.03;4)" office:value-type="float" office:value="0.888487047915689" calcext:value-type="float">
            <text:p><text:s/>0.8885 </text:p>
          </table:table-cell>
          <table:table-cell table:style-name="ce73" table:formula="of:=1/POWER(1.03;5)" office:value-type="float" office:value="0.862608784384164" calcext:value-type="float">
            <text:p><text:s/>0.8626 </text:p>
          </table:table-cell>
          <table:table-cell table:number-columns-repeated="16376"/>
        </table:table-row>
        <table:table-row table:style-name="ro1" table:number-rows-repeated="2">
          <table:table-cell table:number-columns-repeated="2"/>
          <table:table-cell table:style-name="ce7"/>
          <table:table-cell table:style-name="ce7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B. PROYECTO APALANCADO</text:p>
          </table:table-cell>
          <table:table-cell table:style-name="ce7"/>
          <table:table-cell table:style-name="ce72" table:number-columns-repeated="5"/>
          <table:table-cell table:number-columns-repeated="16376"/>
        </table:table-row>
        <table:table-row table:style-name="ro1">
          <table:table-cell table:number-columns-repeated="2"/>
          <table:table-cell table:style-name="ce7"/>
          <table:table-cell table:style-name="ce7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MORTIZACION DE LA DEUDA</text:p>
          </table:table-cell>
          <table:table-cell table:style-name="ce7"/>
          <table:table-cell table:style-name="ce72" table:number-columns-repeated="5"/>
          <table:table-cell table:number-columns-repeated="16376"/>
        </table:table-row>
        <table:table-row table:style-name="ro1">
          <table:table-cell table:number-columns-repeated="2"/>
          <table:table-cell table:style-name="ce7"/>
          <table:table-cell table:style-name="ce7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nto del prestamo</text:p>
          </table:table-cell>
          <table:table-cell table:style-name="ce38" table:formula="of:=3000000" office:value-type="currency" office:currency="S/." office:value="3000000" calcext:value-type="currency">
            <text:p><text:s/>S/. 3,000,000 </text:p>
          </table:table-cell>
          <table:table-cell table:style-name="ce74"/>
          <table:table-cell table:style-name="ce72" table:number-columns-repeated="4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EA</text:p>
          </table:table-cell>
          <table:table-cell table:style-name="ce39" office:value-type="percentage" office:value="0.15" calcext:value-type="percentage">
            <text:p>15 %</text:p>
          </table:table-cell>
          <table:table-cell table:style-name="ce7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nflacion Peru</text:p>
          </table:table-cell>
          <table:table-cell table:style-name="ce39" office:value-type="percentage" office:value="0.02" calcext:value-type="percentage">
            <text:p>2 %</text:p>
          </table:table-cell>
          <table:table-cell table:style-name="ce7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EA real</text:p>
          </table:table-cell>
          <table:table-cell table:style-name="ce39" table:formula="of:=((1+[.C58])/(1+[.C59])) -1" office:value-type="percentage" office:value="0.127450980392157" calcext:value-type="percentage">
            <text:p>13 %</text:p>
          </table:table-cell>
          <table:table-cell table:style-name="ce7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7" office:value-type="float" office:value="5" calcext:value-type="float">
            <text:p>5</text:p>
          </table:table-cell>
          <table:table-cell table:style-name="ce72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AGO</text:p>
          </table:table-cell>
          <table:table-cell table:style-name="ce40" table:formula="of:=-PMT([.C60];[.C61];[.C57])" office:value-type="float" office:value="847645.050290172" calcext:value-type="float">
            <text:p>S/. 847,645</text:p>
          </table:table-cell>
          <table:table-cell table:style-name="ce72" table:number-columns-repeated="5"/>
          <table:table-cell table:number-columns-repeated="16376"/>
        </table:table-row>
        <table:table-row table:style-name="ro1">
          <table:table-cell table:number-columns-repeated="2"/>
          <table:table-cell table:style-name="ce7"/>
          <table:table-cell table:style-name="ce72" table:number-columns-repeated="5"/>
          <table:table-cell table:number-columns-repeated="16376"/>
        </table:table-row>
        <table:table-row table:style-name="ro1">
          <table:table-cell/>
          <table:table-cell table:style-name="ce15" office:value-type="string" calcext:value-type="string">
            <text:p>PERIODO</text:p>
          </table:table-cell>
          <table:table-cell table:style-name="ce15" office:value-type="string" calcext:value-type="string">
            <text:p>Año 0</text:p>
          </table:table-cell>
          <table:table-cell table:style-name="ce75" office:value-type="string" office:string-value="Año 1" calcext:value-type="string">
            <text:p><text:s/>Año 1 </text:p>
          </table:table-cell>
          <table:table-cell table:style-name="ce75" office:value-type="string" office:string-value="Año 2" calcext:value-type="string">
            <text:p><text:s/>Año 2 </text:p>
          </table:table-cell>
          <table:table-cell table:style-name="ce75" office:value-type="string" office:string-value="Año3" calcext:value-type="string">
            <text:p><text:s/>Año3 </text:p>
          </table:table-cell>
          <table:table-cell table:style-name="ce75" office:value-type="string" office:string-value="Año 4" calcext:value-type="string">
            <text:p><text:s/>Año 4 </text:p>
          </table:table-cell>
          <table:table-cell table:style-name="ce75" office:value-type="string" office:string-value="Año 5" calcext:value-type="string">
            <text:p><text:s/>Año 5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Deuda Inicial</text:p>
          </table:table-cell>
          <table:table-cell table:style-name="ce41" table:formula="of:=[.C57]" office:value-type="currency" office:currency="S/." office:value="3000000" calcext:value-type="currency">
            <text:p><text:s/>S/. 3,000,000 </text:p>
          </table:table-cell>
          <table:table-cell table:style-name="ce76" table:formula="of:=[.C69]" office:value-type="float" office:value="3000000" calcext:value-type="float">
            <text:p><text:s/>3,000,000 </text:p>
          </table:table-cell>
          <table:table-cell table:style-name="ce76" table:formula="of:=[.D69]" office:value-type="float" office:value="2534707.8908863" calcext:value-type="float">
            <text:p><text:s/>2,534,708 </text:p>
          </table:table-cell>
          <table:table-cell table:style-name="ce76" table:formula="of:=[.E69]" office:value-type="float" office:value="2010113.84629732" calcext:value-type="float">
            <text:p><text:s/>2,010,114 </text:p>
          </table:table-cell>
          <table:table-cell table:style-name="ce76" table:formula="of:=[.F69]" office:value-type="float" office:value="1418659.77641759" calcext:value-type="float">
            <text:p><text:s/>1,418,660 </text:p>
          </table:table-cell>
          <table:table-cell table:style-name="ce76" table:formula="of:=[.G69]" office:value-type="float" office:value="751824.305474761" calcext:value-type="float">
            <text:p><text:s/>751,824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Interes</text:p>
          </table:table-cell>
          <table:table-cell table:style-name="ce10" office:value-type="float" office:value="0" calcext:value-type="float">
            <text:p>0</text:p>
          </table:table-cell>
          <table:table-cell table:style-name="ce77" table:formula="of:=[.D65]*[.$C$60]" office:value-type="float" office:value="382352.941176471" calcext:value-type="float">
            <text:p><text:s/>382,352.9 </text:p>
          </table:table-cell>
          <table:table-cell table:style-name="ce77" table:formula="of:=[.E65]*[.$C$60]" office:value-type="float" office:value="323051.005701195" calcext:value-type="float">
            <text:p><text:s/>323,051.0 </text:p>
          </table:table-cell>
          <table:table-cell table:style-name="ce77" table:formula="of:=[.F65]*[.$C$60]" office:value-type="float" office:value="256190.980410443" calcext:value-type="float">
            <text:p><text:s/>256,191.0 </text:p>
          </table:table-cell>
          <table:table-cell table:style-name="ce77" table:formula="of:=[.G65]*[.$C$60]" office:value-type="float" office:value="180809.57934734" calcext:value-type="float">
            <text:p><text:s/>180,809.6 </text:p>
          </table:table-cell>
          <table:table-cell table:style-name="ce77" table:formula="of:=[.H65]*[.$C$60]" office:value-type="float" office:value="95820.7448154108" calcext:value-type="float">
            <text:p><text:s/>95,820.7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Capital</text:p>
          </table:table-cell>
          <table:table-cell table:style-name="ce10" office:value-type="float" office:value="0" calcext:value-type="float">
            <text:p>0</text:p>
          </table:table-cell>
          <table:table-cell table:style-name="ce78" table:formula="of:=[.D68]-[.D66]" office:value-type="float" office:value="465292.109113701" calcext:value-type="float">
            <text:p><text:s/>465,292 </text:p>
          </table:table-cell>
          <table:table-cell table:style-name="ce78" table:formula="of:=[.E68]-[.E66]" office:value-type="float" office:value="524594.044588977" calcext:value-type="float">
            <text:p><text:s/>524,594 </text:p>
          </table:table-cell>
          <table:table-cell table:style-name="ce78" table:formula="of:=[.F68]-[.F66]" office:value-type="float" office:value="591454.069879729" calcext:value-type="float">
            <text:p><text:s/>591,454 </text:p>
          </table:table-cell>
          <table:table-cell table:style-name="ce78" table:formula="of:=[.G68]-[.G66]" office:value-type="float" office:value="666835.470942832" calcext:value-type="float">
            <text:p><text:s/>666,835 </text:p>
          </table:table-cell>
          <table:table-cell table:style-name="ce78" table:formula="of:=[.H68]-[.H66]" office:value-type="float" office:value="751824.305474761" calcext:value-type="float">
            <text:p><text:s/>751,824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Amortizacion de la deuda</text:p>
          </table:table-cell>
          <table:table-cell table:style-name="ce10" office:value-type="float" office:value="0" calcext:value-type="float">
            <text:p>0</text:p>
          </table:table-cell>
          <table:table-cell table:style-name="ce76" table:formula="of:=[.$C$62]" office:value-type="float" office:value="847645.050290172" calcext:value-type="float">
            <text:p><text:s/>847,645 </text:p>
          </table:table-cell>
          <table:table-cell table:style-name="ce76" table:formula="of:=[.$C$62]" office:value-type="float" office:value="847645.050290172" calcext:value-type="float">
            <text:p><text:s/>847,645 </text:p>
          </table:table-cell>
          <table:table-cell table:style-name="ce76" table:formula="of:=[.$C$62]" office:value-type="float" office:value="847645.050290172" calcext:value-type="float">
            <text:p><text:s/>847,645 </text:p>
          </table:table-cell>
          <table:table-cell table:style-name="ce76" table:formula="of:=[.$C$62]" office:value-type="float" office:value="847645.050290172" calcext:value-type="float">
            <text:p><text:s/>847,645 </text:p>
          </table:table-cell>
          <table:table-cell table:style-name="ce76" table:formula="of:=[.$C$62]" office:value-type="float" office:value="847645.050290172" calcext:value-type="float">
            <text:p><text:s/>847,645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Deuda Final</text:p>
          </table:table-cell>
          <table:table-cell table:style-name="ce42" table:formula="of:=[.C65]-[.C67]" office:value-type="currency" office:currency="S/." office:value="3000000" calcext:value-type="currency">
            <text:p><text:s/>S/. 3,000,000 </text:p>
          </table:table-cell>
          <table:table-cell table:style-name="ce42" table:formula="of:=[.D65]-[.D67]" office:value-type="currency" office:currency="S/." office:value="2534707.8908863" calcext:value-type="currency">
            <text:p><text:s/>S/. 2,534,708 </text:p>
          </table:table-cell>
          <table:table-cell table:style-name="ce42" table:formula="of:=[.E65]-[.E67]" office:value-type="currency" office:currency="S/." office:value="2010113.84629732" calcext:value-type="currency">
            <text:p><text:s/>S/. 2,010,114 </text:p>
          </table:table-cell>
          <table:table-cell table:style-name="ce42" table:formula="of:=[.F65]-[.F67]" office:value-type="currency" office:currency="S/." office:value="1418659.77641759" calcext:value-type="currency">
            <text:p><text:s/>S/. 1,418,660 </text:p>
          </table:table-cell>
          <table:table-cell table:style-name="ce42" table:formula="of:=[.G65]-[.G67]" office:value-type="currency" office:currency="S/." office:value="751824.305474761" calcext:value-type="currency">
            <text:p><text:s/>S/. 751,824 </text:p>
          </table:table-cell>
          <table:table-cell table:style-name="ce42" table:formula="of:=[.H65]-[.H67]" office:value-type="currency" office:currency="S/." office:value="0" calcext:value-type="currency">
            <text:p><text:s/>S/. - <text:s text:c="2"/></text:p>
          </table:table-cell>
          <table:table-cell table:number-columns-repeated="16376"/>
        </table:table-row>
        <table:table-row table:style-name="ro1" table:number-rows-repeated="2">
          <table:table-cell table:number-columns-repeated="2"/>
          <table:table-cell table:style-name="ce7"/>
          <table:table-cell table:style-name="ce72" table:number-columns-repeated="5"/>
          <table:table-cell table:number-columns-repeated="16376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FLUJOS DE CAJA ECONOMICO Y FINANCIERO</text:p>
          </table:table-cell>
          <table:covered-table-cell table:number-columns-repeated="5" table:style-name="ce43"/>
          <table:covered-table-cell table:style-name="ce89"/>
          <table:table-cell table:number-columns-repeated="16376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RUBROS</text:p>
          </table:table-cell>
          <table:table-cell table:style-name="ce44" office:value-type="string" calcext:value-type="string" table:number-columns-spanned="6" table:number-rows-spanned="1">
            <text:p>PERIODOS</text:p>
          </table:table-cell>
          <table:covered-table-cell table:number-columns-repeated="4" table:style-name="ce79"/>
          <table:covered-table-cell table:style-name="ce90"/>
          <table:table-cell table:number-columns-repeated="16376"/>
        </table:table-row>
        <table:table-row table:style-name="ro1">
          <table:table-cell/>
          <table:covered-table-cell table:style-name="ce18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102"/>
          <table:table-cell table:number-columns-repeated="16375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Inversiones y Liquidación</text:p>
          </table:table-cell>
          <table:covered-table-cell table:number-columns-repeated="5" table:style-name="ce46"/>
          <table:covered-table-cell table:style-name="ce91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Activo Fijo Tangible (-)</text:p>
          </table:table-cell>
          <table:table-cell table:style-name="ce47" table:formula="of:=-([.C18]-[.C17])" office:value-type="float" office:value="-5000000" calcext:value-type="float">
            <text:p>-5,000,000</text:p>
          </table:table-cell>
          <table:table-cell table:style-name="ce47" table:formula="of:=-[.D18]" office:value-type="float" office:value="-1000000" calcext:value-type="float">
            <text:p>-1,000,000</text:p>
          </table:table-cell>
          <table:table-cell table:style-name="ce85" table:number-columns-repeated="3"/>
          <table:table-cell table:style-name="ce92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Activo Fijo Intangible(-)</text:p>
          </table:table-cell>
          <table:table-cell table:style-name="ce48" table:formula="of:=-[.C17]" office:value-type="float" office:value="-300000" calcext:value-type="float">
            <text:p>-300,000</text:p>
          </table:table-cell>
          <table:table-cell table:style-name="ce80" table:number-columns-repeated="4"/>
          <table:table-cell table:style-name="ce93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Capital de Trabajo (-)</text:p>
          </table:table-cell>
          <table:table-cell table:style-name="ce48" table:formula="of:=-[.C20]" office:value-type="float" office:value="-300000" calcext:value-type="float">
            <text:p>-300,000</text:p>
          </table:table-cell>
          <table:table-cell table:style-name="ce48" table:formula="of:=-[.D20]" office:value-type="float" office:value="-600000" calcext:value-type="float">
            <text:p>-600,000</text:p>
          </table:table-cell>
          <table:table-cell table:style-name="ce80" table:number-columns-repeated="3"/>
          <table:table-cell table:style-name="ce93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Ingresos venta de Edificios (+)</text:p>
          </table:table-cell>
          <table:table-cell table:style-name="ce48"/>
          <table:table-cell table:style-name="ce80" table:number-columns-repeated="4"/>
          <table:table-cell table:style-name="ce93" table:formula="of:=[.I25]" office:value-type="float" office:value="2500000" calcext:value-type="float">
            <text:p>2,50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Ingresos por venta de Equipos (+)</text:p>
          </table:table-cell>
          <table:table-cell table:style-name="ce48"/>
          <table:table-cell table:style-name="ce80" table:number-columns-repeated="4"/>
          <table:table-cell table:style-name="ce93" table:formula="of:=[.I26]" office:value-type="float" office:value="600000" calcext:value-type="float">
            <text:p>60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Valor recupero Capital Trabajo (+)</text:p>
          </table:table-cell>
          <table:table-cell table:style-name="ce48"/>
          <table:table-cell table:style-name="ce80" table:number-columns-repeated="4"/>
          <table:table-cell table:style-name="ce93" table:formula="of:=-([.C81]+[.D81])" office:value-type="float" office:value="900000" calcext:value-type="float">
            <text:p>90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Valor recupero de Terreno (+)</text:p>
          </table:table-cell>
          <table:table-cell table:style-name="ce48"/>
          <table:table-cell table:style-name="ce80" table:number-columns-repeated="4"/>
          <table:table-cell table:style-name="ce93" table:formula="of:=[.C14]" office:value-type="float" office:value="300000" calcext:value-type="float">
            <text:p>300,000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Flujo de Inversiones</text:p>
          </table:table-cell>
          <table:table-cell table:style-name="ce49" table:formula="of:=SUM([.C79:.C85])" office:value-type="float" office:value="-5600000" calcext:value-type="float">
            <text:p>-5,600,000</text:p>
          </table:table-cell>
          <table:table-cell table:style-name="ce49" table:formula="of:=SUM([.D79:.D85])" office:value-type="float" office:value="-1600000" calcext:value-type="float">
            <text:p>-1,600,000</text:p>
          </table:table-cell>
          <table:table-cell table:style-name="ce49" table:formula="of:=SUM([.E79:.E85])" office:value-type="float" office:value="0" calcext:value-type="float">
            <text:p>0</text:p>
          </table:table-cell>
          <table:table-cell table:style-name="ce49" table:formula="of:=SUM([.F79:.F85])" office:value-type="float" office:value="0" calcext:value-type="float">
            <text:p>0</text:p>
          </table:table-cell>
          <table:table-cell table:style-name="ce49" table:formula="of:=SUM([.G79:.G85])" office:value-type="float" office:value="0" calcext:value-type="float">
            <text:p>0</text:p>
          </table:table-cell>
          <table:table-cell table:style-name="ce49" table:formula="of:=SUM([.H79:.H85])" office:value-type="float" office:value="4300000" calcext:value-type="float">
            <text:p>4,300,000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Costos y Gastos Operativos</text:p>
          </table:table-cell>
          <table:covered-table-cell table:number-columns-repeated="5" table:style-name="ce50"/>
          <table:covered-table-cell table:style-name="ce94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Ingresos en efectivo (+)</text:p>
          </table:table-cell>
          <table:table-cell table:style-name="ce47" table:formula="of:=[.C10]" office:value-type="float" office:value="0" calcext:value-type="float">
            <text:p>0</text:p>
          </table:table-cell>
          <table:table-cell table:style-name="ce47" table:formula="of:=[.D10]" office:value-type="float" office:value="1200000" calcext:value-type="float">
            <text:p>1,200,000</text:p>
          </table:table-cell>
          <table:table-cell table:style-name="ce47" table:formula="of:=[.E10]" office:value-type="float" office:value="2400000" calcext:value-type="float">
            <text:p>2,400,000</text:p>
          </table:table-cell>
          <table:table-cell table:style-name="ce47" table:formula="of:=[.F10]" office:value-type="float" office:value="2400000" calcext:value-type="float">
            <text:p>2,400,000</text:p>
          </table:table-cell>
          <table:table-cell table:style-name="ce47" table:formula="of:=[.G10]" office:value-type="float" office:value="2400000" calcext:value-type="float">
            <text:p>2,400,000</text:p>
          </table:table-cell>
          <table:table-cell table:style-name="ce47" table:formula="of:=[.H10]" office:value-type="float" office:value="2400000" calcext:value-type="float">
            <text:p>2,40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Otros Ingresos (+)</text:p>
          </table:table-cell>
          <table:table-cell table:style-name="ce48"/>
          <table:table-cell table:style-name="ce80" table:number-columns-repeated="4"/>
          <table:table-cell table:style-name="ce93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Costos de Operación (*) (-)</text:p>
          </table:table-cell>
          <table:table-cell table:style-name="ce48"/>
          <table:table-cell table:style-name="ce80" table:formula="of:=[.D35]+[.D36]+[.D37]+[.D38]" office:value-type="float" office:value="-195000" calcext:value-type="float">
            <text:p>-195,000</text:p>
          </table:table-cell>
          <table:table-cell table:style-name="ce80" table:formula="of:=[.E35]+[.E36]+[.E37]+[.E38]" office:value-type="float" office:value="-390000" calcext:value-type="float">
            <text:p>-390,000</text:p>
          </table:table-cell>
          <table:table-cell table:style-name="ce80" table:formula="of:=[.F35]+[.F36]+[.F37]+[.F38]" office:value-type="float" office:value="-390000" calcext:value-type="float">
            <text:p>-390,000</text:p>
          </table:table-cell>
          <table:table-cell table:style-name="ce80" table:formula="of:=[.G35]+[.G36]+[.G37]+[.G38]" office:value-type="float" office:value="-390000" calcext:value-type="float">
            <text:p>-390,000</text:p>
          </table:table-cell>
          <table:table-cell table:style-name="ce80" table:formula="of:=[.H35]+[.H36]+[.H37]+[.H38]" office:value-type="float" office:value="-390000" calcext:value-type="float">
            <text:p>-39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Gastos de Administración(**)(-)</text:p>
          </table:table-cell>
          <table:table-cell table:style-name="ce48"/>
          <table:table-cell table:style-name="ce80" table:formula="of:=[.D44]" office:value-type="float" office:value="-75000" calcext:value-type="float">
            <text:p>-75,000</text:p>
          </table:table-cell>
          <table:table-cell table:style-name="ce80" table:formula="of:=[.E44]" office:value-type="float" office:value="-150000" calcext:value-type="float">
            <text:p>-150,000</text:p>
          </table:table-cell>
          <table:table-cell table:style-name="ce80" table:formula="of:=[.F44]" office:value-type="float" office:value="-150000" calcext:value-type="float">
            <text:p>-150,000</text:p>
          </table:table-cell>
          <table:table-cell table:style-name="ce80" table:formula="of:=[.G44]" office:value-type="float" office:value="-150000" calcext:value-type="float">
            <text:p>-150,000</text:p>
          </table:table-cell>
          <table:table-cell table:style-name="ce80" table:formula="of:=[.H44]" office:value-type="float" office:value="-150000" calcext:value-type="float">
            <text:p>-15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Gastos de Ventas (-)</text:p>
          </table:table-cell>
          <table:table-cell table:style-name="ce48"/>
          <table:table-cell table:style-name="ce80" table:formula="of:=[.D45]" office:value-type="float" office:value="-30000" calcext:value-type="float">
            <text:p>-30,000</text:p>
          </table:table-cell>
          <table:table-cell table:style-name="ce80" table:formula="of:=[.E45]" office:value-type="float" office:value="-60000" calcext:value-type="float">
            <text:p>-60,000</text:p>
          </table:table-cell>
          <table:table-cell table:style-name="ce80" table:formula="of:=[.F45]" office:value-type="float" office:value="-60000" calcext:value-type="float">
            <text:p>-60,000</text:p>
          </table:table-cell>
          <table:table-cell table:style-name="ce80" table:formula="of:=[.G45]" office:value-type="float" office:value="-60000" calcext:value-type="float">
            <text:p>-60,000</text:p>
          </table:table-cell>
          <table:table-cell table:style-name="ce80" table:formula="of:=[.H45]" office:value-type="float" office:value="-60000" calcext:value-type="float">
            <text:p>-6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Impuestos y Tributos (-)</text:p>
          </table:table-cell>
          <table:table-cell table:style-name="ce51"/>
          <table:table-cell table:style-name="ce81" table:formula="of:=[.D47]" office:value-type="float" office:value="-70194.1747572815" calcext:value-type="float">
            <text:p>-70,194</text:p>
          </table:table-cell>
          <table:table-cell table:style-name="ce81" table:formula="of:=[.E47]" office:value-type="float" office:value="-207081.723065322" calcext:value-type="float">
            <text:p>-207,082</text:p>
          </table:table-cell>
          <table:table-cell table:style-name="ce81" table:formula="of:=[.F47]" office:value-type="float" office:value="-208914.294238177" calcext:value-type="float">
            <text:p>-208,914</text:p>
          </table:table-cell>
          <table:table-cell table:style-name="ce81" table:formula="of:=[.G47]" office:value-type="float" office:value="-210693.489551628" calcext:value-type="float">
            <text:p>-210,693</text:p>
          </table:table-cell>
          <table:table-cell table:style-name="ce81" table:formula="of:=[.H47]" office:value-type="float" office:value="-171170.863642357" calcext:value-type="float">
            <text:p>-171,171</text:p>
          </table:table-cell>
          <table:table-cell table:number-columns-repeated="16376"/>
        </table:table-row>
        <table:table-row table:style-name="ro1">
          <table:table-cell/>
          <table:table-cell table:style-name="ce22" office:value-type="string" calcext:value-type="string">
            <text:p>Flujo de Caja Operativo</text:p>
          </table:table-cell>
          <table:table-cell table:style-name="ce52"/>
          <table:table-cell table:style-name="ce52" table:formula="of:=SUM([.D88:.D93])" office:value-type="float" office:value="829805.825242718" calcext:value-type="float">
            <text:p>829,806</text:p>
          </table:table-cell>
          <table:table-cell table:style-name="ce52" table:formula="of:=SUM([.E88:.E93])" office:value-type="float" office:value="1592918.27693468" calcext:value-type="float">
            <text:p>1,592,918</text:p>
          </table:table-cell>
          <table:table-cell table:style-name="ce52" table:formula="of:=SUM([.F88:.F93])" office:value-type="float" office:value="1591085.70576182" calcext:value-type="float">
            <text:p>1,591,086</text:p>
          </table:table-cell>
          <table:table-cell table:style-name="ce52" table:formula="of:=SUM([.G88:.G93])" office:value-type="float" office:value="1589306.51044837" calcext:value-type="float">
            <text:p>1,589,307</text:p>
          </table:table-cell>
          <table:table-cell table:style-name="ce52" table:formula="of:=SUM([.H88:.H93])" office:value-type="float" office:value="1628829.13635764" calcext:value-type="float">
            <text:p>1,628,829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Flujo de Caja Económico (FCE)</text:p>
          </table:table-cell>
          <table:table-cell table:style-name="ce53" table:formula="of:=[.C86]+[.C94]" office:value-type="float" office:value="-5600000" calcext:value-type="float">
            <text:p>-5,600,000.0</text:p>
          </table:table-cell>
          <table:table-cell table:style-name="ce53" table:formula="of:=[.D86]+[.D94]" office:value-type="float" office:value="-770194.174757282" calcext:value-type="float">
            <text:p>-770,194.2</text:p>
          </table:table-cell>
          <table:table-cell table:style-name="ce53" table:formula="of:=[.E86]+[.E94]" office:value-type="float" office:value="1592918.27693468" calcext:value-type="float">
            <text:p>1,592,918.3</text:p>
          </table:table-cell>
          <table:table-cell table:style-name="ce53" table:formula="of:=[.F86]+[.F94]" office:value-type="float" office:value="1591085.70576182" calcext:value-type="float">
            <text:p>1,591,085.7</text:p>
          </table:table-cell>
          <table:table-cell table:style-name="ce53" table:formula="of:=[.G86]+[.G94]" office:value-type="float" office:value="1589306.51044837" calcext:value-type="float">
            <text:p>1,589,306.5</text:p>
          </table:table-cell>
          <table:table-cell table:style-name="ce53" table:formula="of:=[.H86]+[.H94]" office:value-type="float" office:value="5928829.13635764" calcext:value-type="float">
            <text:p>5,928,829.1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Financiamiento Neto</text:p>
          </table:table-cell>
          <table:covered-table-cell table:number-columns-repeated="5" table:style-name="ce54"/>
          <table:covered-table-cell table:style-name="ce95"/>
          <table:table-cell table:number-columns-repeated="16376"/>
        </table:table-row>
        <table:table-row table:style-name="ro1">
          <table:table-cell/>
          <table:table-cell table:style-name="ce24" office:value-type="string" calcext:value-type="string">
            <text:p><text:s/>+ Préstamos</text:p>
          </table:table-cell>
          <table:table-cell table:style-name="ce55" table:formula="of:=[.C65]" office:value-type="float" office:value="3000000" calcext:value-type="float">
            <text:p>3,000,000.00</text:p>
          </table:table-cell>
          <table:table-cell table:style-name="ce82" table:number-columns-repeated="4"/>
          <table:table-cell table:style-name="ce96"/>
          <table:table-cell table:number-columns-repeated="16376"/>
        </table:table-row>
        <table:table-row table:style-name="ro1">
          <table:table-cell/>
          <table:table-cell table:style-name="ce25" office:value-type="string" calcext:value-type="string">
            <text:p><text:s/>- Amortizaciones</text:p>
          </table:table-cell>
          <table:table-cell table:style-name="ce56"/>
          <table:table-cell table:style-name="ce83" table:formula="of:=-[.D67]" office:value-type="float" office:value="-465292.109113701" calcext:value-type="float">
            <text:p>-465,292.11</text:p>
          </table:table-cell>
          <table:table-cell table:style-name="ce83" table:formula="of:=-[.E67]" office:value-type="float" office:value="-524594.044588977" calcext:value-type="float">
            <text:p>-524,594.04</text:p>
          </table:table-cell>
          <table:table-cell table:style-name="ce83" table:formula="of:=-[.F67]" office:value-type="float" office:value="-591454.069879729" calcext:value-type="float">
            <text:p>-591,454.07</text:p>
          </table:table-cell>
          <table:table-cell table:style-name="ce83" table:formula="of:=-[.G67]" office:value-type="float" office:value="-666835.470942832" calcext:value-type="float">
            <text:p>-666,835.47</text:p>
          </table:table-cell>
          <table:table-cell table:style-name="ce83" table:formula="of:=-[.H67]" office:value-type="float" office:value="-751824.305474761" calcext:value-type="float">
            <text:p>-751,824.31</text:p>
          </table:table-cell>
          <table:table-cell table:number-columns-repeated="16376"/>
        </table:table-row>
        <table:table-row table:style-name="ro1">
          <table:table-cell/>
          <table:table-cell table:style-name="ce25" office:value-type="string" calcext:value-type="string">
            <text:p><text:s/>- Intereses</text:p>
          </table:table-cell>
          <table:table-cell table:style-name="ce56"/>
          <table:table-cell table:style-name="ce83" table:formula="of:=-[.D66]" office:value-type="float" office:value="-382352.941176471" calcext:value-type="float">
            <text:p>-382,352.94</text:p>
          </table:table-cell>
          <table:table-cell table:style-name="ce83" table:formula="of:=-[.E66]" office:value-type="float" office:value="-323051.005701195" calcext:value-type="float">
            <text:p>-323,051.01</text:p>
          </table:table-cell>
          <table:table-cell table:style-name="ce83" table:formula="of:=-[.F66]" office:value-type="float" office:value="-256190.980410443" calcext:value-type="float">
            <text:p>-256,190.98</text:p>
          </table:table-cell>
          <table:table-cell table:style-name="ce83" table:formula="of:=-[.G66]" office:value-type="float" office:value="-180809.57934734" calcext:value-type="float">
            <text:p>-180,809.58</text:p>
          </table:table-cell>
          <table:table-cell table:style-name="ce83" table:formula="of:=-[.H66]" office:value-type="float" office:value="-95820.7448154108" calcext:value-type="float">
            <text:p>-95,820.74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string" calcext:value-type="string">
            <text:p><text:s/>+ Escudo Fiscal o tributario</text:p>
          </table:table-cell>
          <table:table-cell table:style-name="ce57"/>
          <table:table-cell table:style-name="ce84" table:formula="of:=-[.D99]*0.15" office:value-type="float" office:value="57352.9411764706" calcext:value-type="float">
            <text:p>57352.94</text:p>
          </table:table-cell>
          <table:table-cell table:style-name="ce84" table:formula="of:=-[.E99]*0.15" office:value-type="float" office:value="48457.6508551792" calcext:value-type="float">
            <text:p>48457.65</text:p>
          </table:table-cell>
          <table:table-cell table:style-name="ce84" table:formula="of:=-[.F99]*0.15" office:value-type="float" office:value="38428.6470615664" calcext:value-type="float">
            <text:p>38428.65</text:p>
          </table:table-cell>
          <table:table-cell table:style-name="ce84" table:formula="of:=-[.G99]*0.15" office:value-type="float" office:value="27121.436902101" calcext:value-type="float">
            <text:p>27121.44</text:p>
          </table:table-cell>
          <table:table-cell table:style-name="ce84" table:formula="of:=-[.H99]*0.15" office:value-type="float" office:value="14373.1117223116" calcext:value-type="float">
            <text:p>14373.11</text:p>
          </table:table-cell>
          <table:table-cell table:number-columns-repeated="16376"/>
        </table:table-row>
        <table:table-row table:style-name="ro1">
          <table:table-cell/>
          <table:table-cell table:style-name="ce22" office:value-type="string" calcext:value-type="string">
            <text:p>Flujo Financiamiento Neto</text:p>
          </table:table-cell>
          <table:table-cell table:style-name="ce58" table:formula="of:=SUM([.C97:.C100])" office:value-type="float" office:value="3000000" calcext:value-type="float">
            <text:p>3,000,000.00</text:p>
          </table:table-cell>
          <table:table-cell table:style-name="ce58" table:formula="of:=SUM([.D97:.D100])" office:value-type="float" office:value="-790292.109113701" calcext:value-type="float">
            <text:p>-790,292.11</text:p>
          </table:table-cell>
          <table:table-cell table:style-name="ce58" table:formula="of:=SUM([.E97:.E100])" office:value-type="float" office:value="-799187.399434993" calcext:value-type="float">
            <text:p>-799,187.40</text:p>
          </table:table-cell>
          <table:table-cell table:style-name="ce58" table:formula="of:=SUM([.F97:.F100])" office:value-type="float" office:value="-809216.403228605" calcext:value-type="float">
            <text:p>-809,216.40</text:p>
          </table:table-cell>
          <table:table-cell table:style-name="ce58" table:formula="of:=SUM([.G97:.G100])" office:value-type="float" office:value="-820523.613388071" calcext:value-type="float">
            <text:p>-820,523.61</text:p>
          </table:table-cell>
          <table:table-cell table:style-name="ce58" table:formula="of:=SUM([.H97:.H100])" office:value-type="float" office:value="-833271.93856786" calcext:value-type="float">
            <text:p>-833,271.94</text:p>
          </table:table-cell>
          <table:table-cell table:number-columns-repeated="16376"/>
        </table:table-row>
        <table:table-row table:style-name="ro1">
          <table:table-cell/>
          <table:table-cell table:style-name="ce27" office:value-type="string" calcext:value-type="string">
            <text:p>Flujo de Caja Financiero (FCF)</text:p>
          </table:table-cell>
          <table:table-cell table:style-name="ce53" table:formula="of:=[.C95]+[.C101]" office:value-type="float" office:value="-2600000" calcext:value-type="float">
            <text:p>-2,600,000.0</text:p>
          </table:table-cell>
          <table:table-cell table:style-name="ce53" table:formula="of:=[.D95]+[.D101]" office:value-type="float" office:value="-1560486.28387098" calcext:value-type="float">
            <text:p>-1,560,486.3</text:p>
          </table:table-cell>
          <table:table-cell table:style-name="ce53" table:formula="of:=[.E95]+[.E101]" office:value-type="float" office:value="793730.877499685" calcext:value-type="float">
            <text:p>793,730.9</text:p>
          </table:table-cell>
          <table:table-cell table:style-name="ce53" table:formula="of:=[.F95]+[.F101]" office:value-type="float" office:value="781869.302533218" calcext:value-type="float">
            <text:p>781,869.3</text:p>
          </table:table-cell>
          <table:table-cell table:style-name="ce53" table:formula="of:=[.G95]+[.G101]" office:value-type="float" office:value="768782.897060301" calcext:value-type="float">
            <text:p>768,782.9</text:p>
          </table:table-cell>
          <table:table-cell table:style-name="ce53" table:formula="of:=[.H95]+[.H101]" office:value-type="float" office:value="5095557.19778978" calcext:value-type="float">
            <text:p>5,095,557.2</text:p>
          </table:table-cell>
          <table:table-cell table:number-columns-repeated="16376"/>
        </table:table-row>
        <table:table-row table:style-name="ro1">
          <table:table-cell/>
          <table:table-cell table:style-name="ce28" office:value-type="string" calcext:value-type="string">
            <text:p>(*) sin depreciaciones</text:p>
          </table:table-cell>
          <table:table-cell table:style-name="ce28" table:number-columns-repeated="6"/>
          <table:table-cell table:number-columns-repeated="16376"/>
        </table:table-row>
        <table:table-row table:style-name="ro1">
          <table:table-cell/>
          <table:table-cell table:style-name="ce28" office:value-type="string" calcext:value-type="string">
            <text:p>(**) sin amortizacion de intangibles</text:p>
          </table:table-cell>
          <table:table-cell table:style-name="ce28" table:number-columns-repeated="6"/>
          <table:table-cell table:number-columns-repeated="16376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9" office:value-type="string" calcext:value-type="string">
            <text:p>FCF Ajustado</text:p>
          </table:table-cell>
          <table:table-cell table:style-name="ce59" table:formula="of:=[.C95]+[.C100]" office:value-type="float" office:value="-5600000" calcext:value-type="float">
            <text:p>-5,600,000.0</text:p>
          </table:table-cell>
          <table:table-cell table:style-name="ce59" table:formula="of:=[.D95]+[.D100]" office:value-type="float" office:value="-712841.233580811" calcext:value-type="float">
            <text:p>-712,841.2</text:p>
          </table:table-cell>
          <table:table-cell table:style-name="ce59" table:formula="of:=[.E95]+[.E100]" office:value-type="float" office:value="1641375.92778986" calcext:value-type="float">
            <text:p>1,641,375.9</text:p>
          </table:table-cell>
          <table:table-cell table:style-name="ce59" table:formula="of:=[.F95]+[.F100]" office:value-type="float" office:value="1629514.35282339" calcext:value-type="float">
            <text:p>1,629,514.4</text:p>
          </table:table-cell>
          <table:table-cell table:style-name="ce59" table:formula="of:=[.G95]+[.G100]" office:value-type="float" office:value="1616427.94735047" calcext:value-type="float">
            <text:p>1,616,427.9</text:p>
          </table:table-cell>
          <table:table-cell table:style-name="ce97" table:formula="of:=[.H95]+[.H100]" office:value-type="float" office:value="5943202.24807996" calcext:value-type="float">
            <text:p>5,943,202.2</text:p>
          </table:table-cell>
          <table:table-cell table:number-columns-repeated="16376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EVALUACION: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Rd real</text:p>
          </table:table-cell>
          <table:table-cell table:style-name="ce60" table:formula="of:=[.C60]" office:value-type="percentage" office:value="0.127450980392157" calcext:value-type="percentage">
            <text:p>13 %</text:p>
          </table:table-cell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Ru real</text:p>
          </table:table-cell>
          <table:table-cell table:style-name="ce60" office:value-type="percentage" office:value="0.14" calcext:value-type="percentage">
            <text:p>14 %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4" office:value-type="string" calcext:value-type="string">
            <text:p>VANE =</text:p>
          </table:table-cell>
          <table:table-cell table:style-name="ce61" table:formula="of:=NPV([.C110];[.D95:.H95])+[.C95]" office:value-type="float" office:value="44272.6049079672" calcext:value-type="float">
            <text:p><text:s/>44,273 </text:p>
          </table:table-cell>
          <table:table-cell table:number-columns-repeated="16381"/>
        </table:table-row>
        <table:table-row table:style-name="ro1">
          <table:table-cell/>
          <table:table-cell table:style-name="ce14" office:value-type="string" calcext:value-type="string">
            <text:p>TIRE =</text:p>
          </table:table-cell>
          <table:table-cell table:style-name="ce62" table:formula="of:=IRR([.C95:.H95])" office:value-type="percentage" office:value="0.142099579353541" calcext:value-type="percentage">
            <text:p>14.21 %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VAND =</text:p>
          </table:table-cell>
          <table:table-cell table:style-name="ce63" table:formula="of:=NPV([.C109];[.D100:.H100])" office:value-type="float" office:value="140479.596980886" calcext:value-type="float">
            <text:p><text:s/>140,480 </text:p>
          </table:table-cell>
          <table:table-cell table:number-columns-repeated="16381"/>
        </table:table-row>
        <table:table-row table:style-name="ro1">
          <table:table-cell/>
          <table:table-cell table:style-name="ce14" office:value-type="string" calcext:value-type="string">
            <text:p>VAN Ajustado =</text:p>
          </table:table-cell>
          <table:table-cell table:style-name="ce64" table:formula="of:=[.C112]+[.C115]" office:value-type="float" office:value="184752.201888853" calcext:value-type="float">
            <text:p><text:s/>184,752 </text:p>
          </table:table-cell>
          <table:table-cell table:number-columns-repeated="16381"/>
        </table:table-row>
        <table:table-row table:style-name="ro1">
          <table:table-cell/>
          <table:table-cell table:style-name="ce14" office:value-type="string" calcext:value-type="string">
            <text:p>TIRF Ajustado =</text:p>
          </table:table-cell>
          <table:table-cell table:style-name="ce65" table:formula="of:=IRR([.C106:.H106])" office:value-type="percentage" office:value="0.148622630137834" calcext:value-type="percentage">
            <text:p>14.86 %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36P1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36P2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8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 "> </number:text>
      <number:fill-character> </number:fill-character>
      <number:number number:decimal-places="4" number:min-decimal-places="4" number:min-integer-digits="1" number:grouping="true"/>
      <number:text loext:blank-width-char=" "> </number:text>
    </number:number-style>
    <number:number-style style:name="N139P1" style:volatile="true">
      <number:text loext:blank-width-char=" "> </number:text>
      <number:fill-character> </number:fill-character>
      <number:text>-</number:text>
      <number:number number:decimal-places="4" number:min-decimal-places="4" number:min-integer-digits="1" number:grouping="true"/>
      <number:text loext:blank-width-char=" "> </number:text>
    </number:number-style>
    <number:number-style style:name="N13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lujos" style:display-name="PageStyle_fluj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onomia</meta:initial-creator>
    <dc:creator>EDISON ACHALMA</dc:creator>
    <meta:print-date>2000-01-13T20:45:18</meta:print-date>
    <meta:creation-date>1999-04-23T15:11:18</meta:creation-date>
    <dc:date>2021-08-03T16:59:22</dc:date>
    <meta:generator>LibreOffice/24.2.4.2$Linux_X86_64 LibreOffice_project/420$Build-2</meta:generator>
    <meta:document-statistic meta:table-count="1" meta:cell-count="381" meta:object-count="0"/>
    <meta:user-defined meta:name="AppVersion">16.0300</meta:user-defined>
    <meta:user-defined meta:name="Company">UNIVERSIDAD DE LOS ANDES</meta:user-defined>
  </office:meta>
</office:document-meta>
</file>