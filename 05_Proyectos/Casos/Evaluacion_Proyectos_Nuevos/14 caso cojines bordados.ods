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56000003008882B6AC.png" manifest:media-type="image/png"/>
  <manifest:file-entry manifest:full-path="Pictures/10000000000005560000030020136186.png" manifest:media-type="image/png"/>
  <manifest:file-entry manifest:full-path="Pictures/10000000000005560000030036A9C512.png" manifest:media-type="image/png"/>
  <manifest:file-entry manifest:full-path="Pictures/100000000000055600000300BE7C83DE.png" manifest:media-type="image/png"/>
  <manifest:file-entry manifest:full-path="Pictures/100000000000055600000300E8C96A6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1" svg:font-family="Calibri"/>
    <style:font-face style:name="Courier" svg:font-family="Courier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0.42cm"/>
    </style:style>
    <style:style style:name="co10" style:family="table-column">
      <style:table-column-properties fo:break-before="auto" style:column-width="4.14cm"/>
    </style:style>
    <style:style style:name="co11" style:family="table-column">
      <style:table-column-properties fo:break-before="auto" style:column-width="1.453cm"/>
    </style:style>
    <style:style style:name="co12" style:family="table-column">
      <style:table-column-properties fo:break-before="auto" style:column-width="2.909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824cm"/>
    </style:style>
    <style:style style:name="co15" style:family="table-column">
      <style:table-column-properties fo:break-before="auto" style:column-width="2.965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1.00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1.203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1.314cm"/>
    </style:style>
    <style:style style:name="co23" style:family="table-column">
      <style:table-column-properties fo:break-before="auto" style:column-width="1.399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1.342cm"/>
    </style:style>
    <style:style style:name="co26" style:family="table-column">
      <style:table-column-properties fo:break-before="auto" style:column-width="1.538cm"/>
    </style:style>
    <style:style style:name="co27" style:family="table-column">
      <style:table-column-properties fo:break-before="auto" style:column-width="3.831cm"/>
    </style:style>
    <style:style style:name="co28" style:family="table-column">
      <style:table-column-properties fo:break-before="auto" style:column-width="0.84cm"/>
    </style:style>
    <style:style style:name="co29" style:family="table-column">
      <style:table-column-properties fo:break-before="auto" style:column-width="7.301cm"/>
    </style:style>
    <style:style style:name="co30" style:family="table-column">
      <style:table-column-properties fo:break-before="auto" style:column-width="1.51cm"/>
    </style:style>
    <style:style style:name="co31" style:family="table-column">
      <style:table-column-properties fo:break-before="auto" style:column-width="1.649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2.517cm"/>
    </style:style>
    <style:style style:name="co34" style:family="table-column">
      <style:table-column-properties fo:break-before="auto" style:column-width="5.315cm"/>
    </style:style>
    <style:style style:name="co35" style:family="table-column">
      <style:table-column-properties fo:break-before="auto" style:column-width="2.097cm"/>
    </style:style>
    <style:style style:name="co36" style:family="table-column">
      <style:table-column-properties fo:break-before="auto" style:column-width="2.489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2.545cm"/>
    </style:style>
    <style:style style:name="co39" style:family="table-column">
      <style:table-column-properties fo:break-before="auto" style:column-width="1.873cm"/>
    </style:style>
    <style:style style:name="co40" style:family="table-column">
      <style:table-column-properties fo:break-before="auto" style:column-width="1.79cm"/>
    </style:style>
    <style:style style:name="co41" style:family="table-column">
      <style:table-column-properties fo:break-before="auto" style:column-width="7.105cm"/>
    </style:style>
    <style:style style:name="co42" style:family="table-column">
      <style:table-column-properties fo:break-before="auto" style:column-width="2.602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4.727cm"/>
    </style:style>
    <style:style style:name="co45" style:family="table-column">
      <style:table-column-properties fo:break-before="auto" style:column-width="2.21cm"/>
    </style:style>
    <style:style style:name="co46" style:family="table-column">
      <style:table-column-properties fo:break-before="auto" style:column-width="1.93cm"/>
    </style:style>
    <style:style style:name="co47" style:family="table-column">
      <style:table-column-properties fo:break-before="auto" style:column-width="2.432cm"/>
    </style:style>
    <style:style style:name="co48" style:family="table-column">
      <style:table-column-properties fo:break-before="auto" style:column-width="2.321cm"/>
    </style:style>
    <style:style style:name="co49" style:family="table-column">
      <style:table-column-properties fo:break-before="auto" style:column-width="1.901cm"/>
    </style:style>
    <style:style style:name="co50" style:family="table-column">
      <style:table-column-properties fo:break-before="auto" style:column-width="2.182cm"/>
    </style:style>
    <style:style style:name="co51" style:family="table-column">
      <style:table-column-properties fo:break-before="auto" style:column-width="1.706cm"/>
    </style:style>
    <style:style style:name="co52" style:family="table-column">
      <style:table-column-properties fo:break-before="auto" style:column-width="5.426cm"/>
    </style:style>
    <style:style style:name="co53" style:family="table-column">
      <style:table-column-properties fo:break-before="auto" style:column-width="4.223cm"/>
    </style:style>
    <style:style style:name="co54" style:family="table-column">
      <style:table-column-properties fo:break-before="auto" style:column-width="5.593cm"/>
    </style:style>
    <style:style style:name="co55" style:family="table-column">
      <style:table-column-properties fo:break-before="auto" style:column-width="2.713cm"/>
    </style:style>
    <style:style style:name="co56" style:family="table-column">
      <style:table-column-properties fo:break-before="auto" style:column-width="2.769cm"/>
    </style:style>
    <style:style style:name="co57" style:family="table-column">
      <style:table-column-properties fo:break-before="auto" style:column-width="1.258cm"/>
    </style:style>
    <style:style style:name="co58" style:family="table-column">
      <style:table-column-properties fo:break-before="auto" style:column-width="0.866cm"/>
    </style:style>
    <style:style style:name="co59" style:family="table-column">
      <style:table-column-properties fo:break-before="auto" style:column-width="5.034cm"/>
    </style:style>
    <style:style style:name="co60" style:family="table-column">
      <style:table-column-properties fo:break-before="auto" style:column-width="1.845cm"/>
    </style:style>
    <style:style style:name="co61" style:family="table-column">
      <style:table-column-properties fo:break-before="auto" style:column-width="2.237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265cm"/>
    </style:style>
    <style:style style:name="co64" style:family="table-column">
      <style:table-column-properties fo:break-before="auto" style:column-width="1.986cm"/>
    </style:style>
    <style:style style:name="co65" style:family="table-column">
      <style:table-column-properties fo:break-before="auto" style:column-width="3.076cm"/>
    </style:style>
    <style:style style:name="co66" style:family="table-column">
      <style:table-column-properties fo:break-before="auto" style:column-width="3.468cm"/>
    </style:style>
    <style:style style:name="co67" style:family="table-column">
      <style:table-column-properties fo:break-before="auto" style:column-width="3.104cm"/>
    </style:style>
    <style:style style:name="co68" style:family="table-column">
      <style:table-column-properties fo:break-before="auto" style:column-width="0.979cm"/>
    </style:style>
    <style:style style:name="co69" style:family="table-column">
      <style:table-column-properties fo:break-before="auto" style:column-width="5.678cm"/>
    </style:style>
    <style:style style:name="co70" style:family="table-column">
      <style:table-column-properties fo:break-before="auto" style:column-width="4.027cm"/>
    </style:style>
    <style:style style:name="co71" style:family="table-column">
      <style:table-column-properties fo:break-before="auto" style:column-width="3.888cm"/>
    </style:style>
    <style:style style:name="co72" style:family="table-column">
      <style:table-column-properties fo:break-before="auto" style:column-width="3.524cm"/>
    </style:style>
    <style:style style:name="co73" style:family="table-column">
      <style:table-column-properties fo:break-before="auto" style:column-width="2.461cm"/>
    </style:style>
    <style:style style:name="co74" style:family="table-column">
      <style:table-column-properties fo:break-before="auto" style:column-width="6.322cm"/>
    </style:style>
    <style:style style:name="co75" style:family="table-column">
      <style:table-column-properties fo:break-before="auto" style:column-width="2.798cm"/>
    </style:style>
    <style:style style:name="co76" style:family="table-column">
      <style:table-column-properties fo:break-before="auto" style:column-width="6.992cm"/>
    </style:style>
    <style:style style:name="co77" style:family="table-column">
      <style:table-column-properties fo:break-before="auto" style:column-width="1.595cm"/>
    </style:style>
    <style:style style:name="co78" style:family="table-column">
      <style:table-column-properties fo:break-before="auto" style:column-width="2.35cm"/>
    </style:style>
    <style:style style:name="co79" style:family="table-column">
      <style:table-column-properties fo:break-before="auto" style:column-width="2.88cm"/>
    </style:style>
    <style:style style:name="co80" style:family="table-column">
      <style:table-column-properties fo:break-before="auto" style:column-width="0.699cm"/>
    </style:style>
    <style:style style:name="co81" style:family="table-column">
      <style:table-column-properties fo:break-before="auto" style:column-width="0.644cm"/>
    </style:style>
    <style:style style:name="co82" style:family="table-column">
      <style:table-column-properties fo:break-before="auto" style:column-width="4.083cm"/>
    </style:style>
    <style:style style:name="co83" style:family="table-column">
      <style:table-column-properties fo:break-before="auto" style:column-width="1.427cm"/>
    </style:style>
    <style:style style:name="co84" style:family="table-column">
      <style:table-column-properties fo:break-before="auto" style:column-width="2.293cm"/>
    </style:style>
    <style:style style:name="co85" style:family="table-column">
      <style:table-column-properties fo:break-before="auto" style:column-width="2.01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238cm" fo:break-before="auto" style:use-optimal-row-height="fals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244cm" fo:break-before="auto" style:use-optimal-row-height="false"/>
    </style:style>
    <style:style style:name="ro17" style:family="table-row">
      <style:table-row-properties style:row-height="0.953cm" fo:break-before="auto" style:use-optimal-row-height="false"/>
    </style:style>
    <style:style style:name="ro18" style:family="table-row">
      <style:table-row-properties style:row-height="1.508cm" fo:break-before="auto" style:use-optimal-row-height="false"/>
    </style:style>
    <style:style style:name="ro19" style:family="table-row">
      <style:table-row-properties style:row-height="0.026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658cm" fo:break-before="auto" style:use-optimal-row-height="true"/>
    </style:style>
    <style:style style:name="ro22" style:family="table-row">
      <style:table-row-properties style:row-height="0.423cm" fo:break-before="auto" style:use-optimal-row-height="false"/>
    </style:style>
    <style:style style:name="ro23" style:family="table-row">
      <style:table-row-properties style:row-height="0.714cm" fo:break-before="auto" style:use-optimal-row-height="false"/>
    </style:style>
    <style:style style:name="ro24" style:family="table-row">
      <style:table-row-properties style:row-height="0.926cm" fo:break-before="auto" style:use-optimal-row-height="false"/>
    </style:style>
    <style:style style:name="ro25" style:family="table-row">
      <style:table-row-properties style:row-height="1.402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0.635cm" fo:break-before="auto" style:use-optimal-row-height="false"/>
    </style:style>
    <style:style style:name="ro28" style:family="table-row">
      <style:table-row-properties style:row-height="0.688cm" fo:break-before="auto" style:use-optimal-row-height="false"/>
    </style:style>
    <style:style style:name="ro29" style:family="table-row">
      <style:table-row-properties style:row-height="0.736cm" fo:break-before="auto" style:use-optimal-row-height="true"/>
    </style:style>
    <style:style style:name="ro30" style:family="table-row">
      <style:table-row-properties style:row-height="0.778cm" fo:break-before="auto" style:use-optimal-row-height="true"/>
    </style:style>
    <style:style style:name="ro31" style:family="table-row">
      <style:table-row-properties style:row-height="0.318cm" fo:break-before="auto" style:use-optimal-row-height="false"/>
    </style:style>
    <style:style style:name="ro32" style:family="table-row">
      <style:table-row-properties style:row-height="1.376cm" fo:break-before="auto" style:use-optimal-row-height="false"/>
    </style:style>
    <style:style style:name="ta1" style:family="table" style:master-page-name="PageStyle_5f_Hoja1">
      <style:table-properties table:display="fals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ta3" style:family="table" style:master-page-name="PageStyle_5f_Resumen_20_del_20_escenario_20_3">
      <style:table-properties table:display="false" style:writing-mode="lr-tb"/>
    </style:style>
    <style:style style:name="ta4" style:family="table" style:master-page-name="PageStyle_5f_DATOS">
      <style:table-properties table:display="true" style:writing-mode="lr-tb" table:tab-color="#00b050"/>
    </style:style>
    <style:style style:name="ta5" style:family="table" style:master-page-name="PageStyle_5f_DATOS">
      <style:table-properties table:display="false" style:writing-mode="lr-tb" table:tab-color="#00b050"/>
    </style:style>
    <style:style style:name="ta6" style:family="table" style:master-page-name="PageStyle_5f_Resumen_20_del_20_escenario">
      <style:table-properties table:display="false" style:writing-mode="lr-tb"/>
    </style:style>
    <style:style style:name="ta7" style:family="table" style:master-page-name="PageStyle_5f_a_29__20_Presupuesto_5f_Ventas">
      <style:table-properties table:display="true" style:writing-mode="lr-tb" table:tab-color="#ffc000"/>
    </style:style>
    <style:style style:name="ta8" style:family="table" style:master-page-name="PageStyle_5f_b_29__20_Inversión_20_Inicial">
      <style:table-properties table:display="true" style:writing-mode="lr-tb" table:tab-color="#ffc000"/>
    </style:style>
    <style:style style:name="ta9" style:family="table" style:master-page-name="PageStyle_5f_c_29__20_Dep._20_y_20_VR">
      <style:table-properties table:display="true" style:writing-mode="lr-tb" table:tab-color="#ffc000"/>
    </style:style>
    <style:style style:name="ta10" style:family="table" style:master-page-name="PageStyle_5f_d_29__20_Costos_5f_producción">
      <style:table-properties table:display="true" style:writing-mode="lr-tb" table:tab-color="#ffc000"/>
    </style:style>
    <style:style style:name="ta11" style:family="table" style:master-page-name="PageStyle_5f_Regimen_20_tributario_20_y_20_laboral">
      <style:table-properties table:display="false" style:writing-mode="lr-tb"/>
    </style:style>
    <style:style style:name="ta12" style:family="table" style:master-page-name="PageStyle_5f_e_29__20_Planilla">
      <style:table-properties table:display="true" style:writing-mode="lr-tb" table:tab-color="#ffc000"/>
    </style:style>
    <style:style style:name="ta13" style:family="table" style:master-page-name="PageStyle_5f_f_29__20_Gastos_5f_Operativos">
      <style:table-properties table:display="true" style:writing-mode="lr-tb" table:tab-color="#ffc000"/>
    </style:style>
    <style:style style:name="ta14" style:family="table" style:master-page-name="PageStyle_5f_g_29__20_Costos_5f_Unitarios">
      <style:table-properties table:display="true" style:writing-mode="lr-tb" table:tab-color="#ffff00"/>
    </style:style>
    <style:style style:name="ta15" style:family="table" style:master-page-name="PageStyle_5f_h_29__20_Capital_5f_Trabajo">
      <style:table-properties table:display="true" style:writing-mode="lr-tb" table:tab-color="#ffff00"/>
    </style:style>
    <style:style style:name="ta16" style:family="table" style:master-page-name="PageStyle_5f_i_29__20_Estado_20_de_20_Resultados">
      <style:table-properties table:display="true" style:writing-mode="lr-tb"/>
    </style:style>
    <style:style style:name="ta17" style:family="table" style:master-page-name="PageStyle_5f_PLAN_20_DE_20_PAGOS">
      <style:table-properties table:display="false" style:writing-mode="lr-tb"/>
    </style:style>
    <style:style style:name="ta18" style:family="table" style:master-page-name="PageStyle_5f_TABLA_20_AMORTIZACIÓN">
      <style:table-properties table:display="false" style:writing-mode="lr-tb" table:tab-color="#376092"/>
    </style:style>
    <style:style style:name="ta19" style:family="table" style:master-page-name="PageStyle_5f_Amortización_20_de_20_Préstamos">
      <style:table-properties table:display="false" style:writing-mode="lr-tb"/>
    </style:style>
    <style:style style:name="ta20" style:family="table" style:master-page-name="PageStyle_5f_betas">
      <style:table-properties table:display="false" style:writing-mode="lr-tb"/>
    </style:style>
    <style:style style:name="ta21" style:family="table" style:master-page-name="PageStyle_5f_j_29__20_cronograma_20_deuda">
      <style:table-properties table:display="true" style:writing-mode="lr-tb"/>
    </style:style>
    <style:style style:name="ta22" style:family="table" style:master-page-name="PageStyle_5f_k_29__20_Flujos_20_de_20_Caja">
      <style:table-properties table:display="true" style:writing-mode="lr-tb"/>
    </style:style>
    <style:style style:name="ta23" style:family="table" style:master-page-name="PageStyle_5f_l._29__20_Ku">
      <style:table-properties table:display="true" style:writing-mode="lr-tb"/>
    </style:style>
    <style:style style:name="ta24" style:family="table" style:master-page-name="PageStyle_5f_m_29__20_Ke_20_y_20_Kwacc">
      <style:table-properties table:display="true" style:writing-mode="lr-tb"/>
    </style:style>
    <style:style style:name="ta25" style:family="table" style:master-page-name="PageStyle_5f_Rentabilidad">
      <style:table-properties table:display="true" style:writing-mode="lr-tb"/>
    </style:style>
    <style:style style:name="ta26" style:family="table" style:master-page-name="PageStyle_5f_Sensibilidad">
      <style:table-properties table:display="true" style:writing-mode="lr-tb"/>
    </style:style>
    <style:style style:name="ta27" style:family="table" style:master-page-name="PageStyle_5f_Escenarios">
      <style:table-properties table:display="true" style:writing-mode="lr-tb"/>
    </style:style>
    <style:style style:name="ta28" style:family="table" style:master-page-name="PageStyle_5f_Hoja7">
      <style:table-properties table:display="false" style:writing-mode="lr-tb"/>
    </style:style>
    <style:style style:name="ta29" style:family="table" style:master-page-name="PageStyle_5f_Hoja6">
      <style:table-properties table:display="false" style:writing-mode="lr-tb"/>
    </style:style>
    <style:style style:name="ta30" style:family="table" style:master-page-name="PageStyle_5f_Hoja5">
      <style:table-properties table:display="false" style:writing-mode="lr-tb"/>
    </style:style>
    <style:style style:name="ta31" style:family="table" style:master-page-name="PageStyle_5f_Hoja4">
      <style:table-properties table:display="false" style:writing-mode="lr-tb"/>
    </style:style>
    <style:style style:name="ta32" style:family="table" style:master-page-name="PageStyle_5f_analisis_20_de_20_sensibilidad">
      <style:table-properties table:display="false" style:writing-mode="lr-tb"/>
    </style:style>
    <style:style style:name="ta33" style:family="table" style:master-page-name="PageStyle_5f_Hoja12">
      <style:table-properties table:display="false" style:writing-mode="lr-tb"/>
    </style:style>
    <style:style style:name="ta34" style:family="table" style:master-page-name="PageStyle_5f_Hoja9">
      <style:table-properties table:display="false" style:writing-mode="lr-tb"/>
    </style:style>
    <style:style style:name="ta35" style:family="table" style:master-page-name="PageStyle_5f_Hoja8">
      <style:table-properties table:display="false" style:writing-mode="lr-tb"/>
    </style:style>
    <style:style style:name="ta36" style:family="table" style:master-page-name="PageStyle_5f_Hoja10">
      <style:table-properties table:display="false" style:writing-mode="lr-tb"/>
    </style:style>
    <style:style style:name="ta37" style:family="table" style:master-page-name="PageStyle_5f_Hoja3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3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3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2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Normal_20_2">
      <style:table-cell-properties fo:border-bottom="none" fo:background-color="#36609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>
      <style:table-cell-properties fo:border-bottom="none" fo:background-color="#36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Normal_20_2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Normal_20_2">
      <style:table-cell-properties fo:border-bottom="none" fo:background-color="#37609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Normal_20_2">
      <style:table-cell-properties fo:border-bottom="none" fo:background-color="#36609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">
      <style:table-cell-properties fo:border-bottom="none" fo:background-color="#36609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376092" style:diagonal-bl-tr="none" style:diagonal-tl-br="none" fo:border="none" style:rotation-align="none">
        <loext:background-complex-color loext:theme-type="accen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Normal_20_2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fo:border-bottom="none" fo:background-color="#366092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fo:border-bottom="none" fo:background-color="#376092" style:diagonal-bl-tr="none" style:diagonal-tl-br="none" fo:border-left="none" fo:border-right="1.76pt solid #000000" style:rotation-align="none" fo:border-top="none">
        <loext:background-complex-color loext:theme-type="accen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366092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2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Normal_20_2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Normal_20_2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2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69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7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72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/>
    </style:style>
    <style:style style:name="ce75" style:family="table-cell" style:parent-style-name="Normal_20_2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Normal_20_2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2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2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Normal_20_2" style:data-style-name="N13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Normal_20_2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Normal_20_2" style:data-style-name="N1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Normal_20_2" style:data-style-name="N145">
      <style:table-cell-properties fo:border-bottom="0.74pt solid #000000" fo:background-color="#d6e3b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Normal_20_2" style:data-style-name="N14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1.76pt solid #000000" fo:background-color="#00b0f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00b0f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134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34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00b0f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3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1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127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1.76pt solid #000000" fo:background-color="#4bacc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1.76pt solid #000000" fo:background-color="#4bacc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4bac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1.76pt solid #000000" fo:background-color="#4bacc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 style:data-style-name="N1">
      <style:table-cell-properties fo:border-bottom="1.76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1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1.76pt solid #000000" fo:background-color="#4bacc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 style:data-style-name="N2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Normal_20_2">
      <style:table-cell-properties fo:border-bottom="0.74pt solid #000000" fo:background-color="#4bacc6" style:diagonal-bl-tr="none" style:diagonal-tl-br="none" fo:border-left="1.76pt solid #000000" fo:border-right="0.74pt solid #000000" style:rotation-align="none" fo:border-top="0.74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Normal_20_2" style:data-style-name="N3">
      <style:table-cell-properties fo:border-bottom="0.74pt solid #000000" fo:background-color="#b9cde5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Normal_20_2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Normal_20_2" style:data-style-name="N3">
      <style:table-cell-properties fo:border-bottom="1.76pt solid #000000" fo:background-color="#4bacc6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Normal_20_2">
      <style:table-cell-properties fo:background-color="#4bac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2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Normal_20_2" style:data-style-name="N4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Normal_20_2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Normal_20_2" style:data-style-name="N3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Normal_20_2" style:data-style-name="N136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Normal_20_2">
      <style:table-cell-properties fo:background-color="#4bacc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2" style:data-style-name="N3">
      <style:table-cell-properties fo:background-color="#b9cd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Normal_20_2" style:data-style-name="N3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Normal_20_2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Normal_20_2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Normal_20_2" style:data-style-name="N13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Normal_20_2">
      <style:table-cell-properties fo:border-bottom="0.74pt solid #000000" fo:background-color="#4bacc6" style:diagonal-bl-tr="none" style:diagonal-tl-br="none" fo:border-left="0.74pt solid #000000" fo:border-right="1.76pt solid #000000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Normal_20_2" style:data-style-name="N4">
      <style:table-cell-properties fo:border-bottom="0.74pt solid #000000" fo:background-color="#b9cde5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Normal_20_2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Normal_20_2" style:data-style-name="N136">
      <style:table-cell-properties fo:border-bottom="0.74pt solid #000000" fo:background-color="#b9cde5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Normal_20_2" style:data-style-name="N3">
      <style:table-cell-properties fo:border-bottom="0.74pt solid #000000" fo:background-color="#b9cde5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Normal_20_2" style:data-style-name="N3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Normal_20_2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Normal_20_2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Normal_20_2" style:data-style-name="N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Normal_20_2" style:data-style-name="N2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Normal_20_2" style:data-style-name="N2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Normal_20_2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Normal_20_2" style:data-style-name="N1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Normal_20_2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Normal_20_2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Normal_20_2">
      <style:table-cell-properties fo:border-bottom="1.76pt solid #000000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Normal_20_2">
      <style:table-cell-properties fo:border-bottom="1.76pt solid #000000" fo:background-color="#4bacc6" style:diagonal-bl-tr="none" style:diagonal-tl-br="none" fo:border-left="1.76pt solid #000000" fo:border-right="0.74pt solid #000000" style:rotation-align="none" fo:border-top="none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2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Normal_20_2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Normal_20_2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Normal_20_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Normal_20_2" style:data-style-name="N3">
      <style:table-cell-properties fo:border-bottom="1.76pt solid #000000" fo:background-color="#b9cde5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Normal_20_2" style:data-style-name="N3">
      <style:table-cell-properties fo:border-bottom="1.76pt solid #000000" fo:background-color="#4bacc6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Normal_20_2">
      <style:table-cell-properties fo:border-bottom="1.76pt solid #000000" fo:background-color="#4bacc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4" style:family="table-cell" style:parent-style-name="Normal_20_2">
      <style:table-cell-properties fo:border-bottom="1.76pt solid #000000" fo:background-color="#4bacc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Normal_20_2" style:data-style-name="N3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Normal_20_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Normal_20_2" style:data-style-name="N3">
      <style:table-cell-properties fo:border-bottom="1.76pt solid #000000" fo:background-color="#b9cde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Normal_20_2" style:data-style-name="N3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Normal_20_2" style:data-style-name="N3">
      <style:table-cell-properties fo:border-bottom="1.76pt solid #000000" fo:background-color="#b9cde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Normal_20_2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Normal_20_2">
      <style:table-cell-properties fo:border-bottom="1.76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Normal_20_2">
      <style:table-cell-properties fo:border-bottom="0.74pt solid #000000" fo:background-color="#4bacc6" style:diagonal-bl-tr="none" style:diagonal-tl-br="none" fo:border-left="none" fo:border-right="0.74pt solid #000000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Normal_20_2">
      <style:table-cell-properties fo:border-bottom="1.76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Normal_20_2">
      <style:table-cell-properties fo:border-bottom="1.76pt solid #000000" fo:background-color="#4bacc6" style:diagonal-bl-tr="none" style:diagonal-tl-br="none" fo:border-left="0.74pt solid #000000" fo:border-right="1.76pt solid #000000" style:rotation-align="none" fo:border-top="none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2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Normal_20_2" style:data-style-name="N3">
      <style:table-cell-properties fo:border-bottom="0.74pt solid #000000" fo:background-color="#b9cde5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Normal_20_2" style:data-style-name="N1">
      <style:table-cell-properties fo:border-bottom="1.76pt solid #000000" fo:background-color="#4bacc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1" style:family="table-cell" style:parent-style-name="Normal_20_2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Normal_20_2">
      <style:table-cell-properties fo:background-color="#4bacc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Normal_20_2" style:data-style-name="N13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Normal_20_2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2" style:data-style-name="N13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Normal_20_2">
      <style:table-cell-properties fo:border-bottom="0.74pt solid #000000" fo:background-color="#4bacc6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Normal_20_2">
      <style:table-cell-properties fo:border-bottom="0.74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Normal_20_2">
      <style:table-cell-properties fo:border-bottom="0.74pt solid #000000" fo:background-color="#4bacc6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8" style:family="table-cell" style:parent-style-name="Normal_20_2">
      <style:table-cell-properties fo:border-bottom="1.76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9" style:family="table-cell" style:parent-style-name="Normal_20_2">
      <style:table-cell-properties fo:border-bottom="1.76pt solid #000000" fo:background-color="#4bacc6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Normal_20_2" style:data-style-name="N2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Normal_20_2" style:data-style-name="N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Normal_20_2" style:data-style-name="N136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Normal_20_2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Normal_20_2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Normal_20_2" style:data-style-name="N1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Normal_20_2" style:data-style-name="N2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Normal_20_2" style:data-style-name="N1">
      <style:table-cell-properties fo:border-bottom="1.76pt solid #000000" fo:background-color="#f2f2f2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Normal_20_2" style:data-style-name="N2">
      <style:table-cell-properties fo:border-bottom="1.76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Normal_20_2" style:data-style-name="N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Normal_20_2" style:data-style-name="N134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Default">
      <style:table-cell-properties fo:border-bottom="0.74pt solid #000000" fo:background-color="#4bacc6" style:diagonal-bl-tr="none" style:diagonal-tl-br="none" fo:border-left="1.76pt solid #000000" fo:border-right="0.74pt solid #000000" style:rotation-align="none" fo:border-top="none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2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3" style:family="table-cell" style:parent-style-name="Default">
      <style:table-cell-properties fo:border-bottom="0.74pt solid #000000" fo:background-color="#4bacc6" style:diagonal-bl-tr="none" style:diagonal-tl-br="none" fo:border-left="0.74pt solid #000000" fo:border-right="0.74pt solid #000000" style:rotation-align="none" fo:border-top="none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6" style:family="table-cell" style:parent-style-name="Default" style:data-style-name="N1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7" style:family="table-cell" style:parent-style-name="Default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8" style:family="table-cell" style:parent-style-name="Default">
      <style:table-cell-properties fo:border-bottom="0.74pt solid #000000" fo:background-color="#4bacc6" style:diagonal-bl-tr="none" style:diagonal-tl-br="none" fo:border-left="none" fo:border-right="none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4bacc6" style:diagonal-bl-tr="none" style:diagonal-tl-br="none" fo:border-left="none" fo:border-right="0.74pt solid #000000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1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Default" style:data-style-name="N1">
      <style:table-cell-properties fo:border-bottom="0.74pt solid #000000" fo:background-color="#ffc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 style:data-style-name="N1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Normal_20_2">
      <style:table-cell-properties fo:border-bottom="none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1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2" style:family="table-cell" style:parent-style-name="Normal_20_2">
      <style:table-cell-properties fo:border-bottom="1.76pt solid #000000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3" style:family="table-cell" style:parent-style-name="Normal_20_2">
      <style:table-cell-properties fo:border-bottom="none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5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Normal_20_2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Normal_20_2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8" style:family="table-cell" style:parent-style-name="Normal_20_2" style:data-style-name="N1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59" style:family="table-cell" style:parent-style-name="Normal_20_2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Normal_20_2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Normal_20_2" style:data-style-name="N1">
      <style:table-cell-properties fo:border-bottom="1.76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2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Normal_20_3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Normal_20_3">
      <style:table-cell-properties fo:border-bottom="1.76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0" style:apply-style-name="ConditionalStyle_5f_16" style:base-cell-address="'PLAN DE PAGOS'.A11"/>
    </style:style>
    <style:style style:name="ce367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0" style:apply-style-name="ConditionalStyle_5f_17" style:base-cell-address="'PLAN DE PAGOS'.A23"/>
    </style:style>
    <style:style style:name="ce368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Normal_20_3" style:data-style-name="N4">
      <style:table-cell-properties fo:background-color="#00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Normal_20_3" style:data-style-name="N4">
      <style:table-cell-properties fo:background-color="#0000ff"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Normal_20_3" style:data-style-name="N4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Normal_20_3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0" style:apply-style-name="ConditionalStyle_5f_16" style:base-cell-address="'PLAN DE PAGOS'.A11"/>
    </style:style>
    <style:style style:name="ce373" style:family="table-cell" style:parent-style-name="Normal_20_3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0" style:apply-style-name="ConditionalStyle_5f_17" style:base-cell-address="'PLAN DE PAGOS'.A23"/>
    </style:style>
    <style:style style:name="ce374" style:family="table-cell" style:parent-style-name="Normal_20_3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Normal_20_3" style:data-style-name="N4">
      <style:table-cell-properties fo:background-color="#99cc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Normal_20_3" style:data-style-name="N138">
      <style:table-cell-properties fo:background-color="#99cc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Normal_20_3" style:data-style-name="N3">
      <style:table-cell-properties fo:background-color="#99cc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Normal_20_3" style:data-style-name="N4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Normal_20_3" style:data-style-name="N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Normal_20_3" style:data-style-name="N11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Normal_20_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Normal_20_4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Normal_20_4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85" style:family="table-cell" style:parent-style-name="Normal_20_4">
      <style:table-cell-properties fo:border-bottom="none" style:diagonal-bl-tr="none" style:diagonal-tl-br="none" fo:border-left="none" fo:border-right="0.74pt solid #000000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86" style:family="table-cell" style:parent-style-name="Normal_20_4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87" style:family="table-cell" style:parent-style-name="Normal_20_4">
      <style:table-cell-properties fo:border-bottom="none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88" style:family="table-cell" style:parent-style-name="Normal_20_4">
      <style:table-cell-properties fo:border-bottom="none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Normal_20_4">
      <style:table-cell-properties fo:border-bottom="none" fo:background-color="#9999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Normal_20_4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91" style:family="table-cell" style:parent-style-name="Normal_20_4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Normal_20_4" style:data-style-name="N139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93" style:family="table-cell" style:parent-style-name="Normal_20_4" style:data-style-name="N13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94" style:family="table-cell" style:parent-style-name="Normal_20_4" style:data-style-name="N13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395" style:family="table-cell" style:parent-style-name="Normal_20_4" style:data-style-name="N142">
      <style:table-cell-properties fo:border-bottom="none" fo:background-color="#37609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96" style:family="table-cell" style:parent-style-name="Normal_20_4" style:data-style-name="N142">
      <style:table-cell-properties fo:border-bottom="none" fo:background-color="#dce6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7" style:family="table-cell" style:parent-style-name="Normal_20_4" style:data-style-name="N3">
      <style:table-cell-properties fo:border-bottom="none" fo:background-color="#dce6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8" style:family="table-cell" style:parent-style-name="Normal_20_4" style:data-style-name="N141">
      <style:table-cell-properties fo:border-bottom="none" fo:background-color="#dce6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Normal_20_4" style:data-style-name="N141">
      <style:table-cell-properties fo:border-bottom="none" fo:background-color="#99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0" style:family="table-cell" style:parent-style-name="Normal_20_4" style:data-style-name="N139">
      <style:table-cell-properties fo:background-color="#4f81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401" style:family="table-cell" style:parent-style-name="Normal_20_4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2" style:family="table-cell" style:parent-style-name="Normal_20_4" style:data-style-name="N10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03" style:family="table-cell" style:parent-style-name="Normal_20_4" style:data-style-name="N139">
      <style:table-cell-properties fo:background-color="#00206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404" style:family="table-cell" style:parent-style-name="Porcentaje_20_2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05" style:family="table-cell" style:parent-style-name="Normal_20_4" style:data-style-name="N139">
      <style:table-cell-properties fo:background-color="#37609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406" style:family="table-cell" style:parent-style-name="Porcentaje_20_2" style:data-style-name="N14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Normal_20_4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Normal_20_4" style:data-style-name="N139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409" style:family="table-cell" style:parent-style-name="Normal_20_4" style:data-style-name="N139">
      <style:table-cell-properties fo:border-bottom="none" style:diagonal-bl-tr="none" style:diagonal-tl-br="none" fo:border-left="0.74pt solid #000000" fo:border-right="none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410" style:family="table-cell" style:parent-style-name="Normal_20_4" style:data-style-name="N139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is-true-formula([.$C16]=[.$E$9])" style:apply-style-name="ConditionalStyle_5f_15" style:base-cell-address="'TABLA AMORTIZACIÓN'.B16"/>
    </style:style>
    <style:style style:name="ce411" style:family="table-cell" style:parent-style-name="Normal_20_2_20_2">
      <style:table-cell-properties fo:background-color="#f2f2f2" style:diagonal-bl-tr="none" style:diagonal-tl-br="none" fo:border="none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Millares_20_2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Normal_20_2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16" style:family="table-cell" style:parent-style-name="Normal_20_2_20_2" style:data-style-name="N4">
      <style:table-cell-properties style:cell-protect="none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19" style:family="table-cell" style:parent-style-name="Normal_20_2_20_2">
      <style:table-cell-properties fo:background-color="#eff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81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0" style:family="table-cell" style:parent-style-name="Normal_20_2_20_2">
      <style:table-cell-properties fo:background-color="#eff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81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1" style:family="table-cell" style:parent-style-name="Normal_20_2_20_2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[.$C$13]=0)" style:apply-style-name="ConditionalStyle_5f_2" style:base-cell-address="'Amortización de Préstamos'.C13"/>
    </style:style>
    <style:style style:name="ce422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ROW()&lt;COUNTIF([.$C:.$C];&quot;&gt;0&quot;)+14)" style:apply-style-name="ConditionalStyle_5f_3" style:base-cell-address="'Amortización de Préstamos'.C13"/>
    </style:style>
    <style:style style:name="ce423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ROW()&lt;COUNTIF([.$C:.$C];&quot;&gt;0&quot;)+14)" style:apply-style-name="ConditionalStyle_5f_3" style:base-cell-address="'Amortización de Préstamos'.C13"/>
    </style:style>
    <style:style style:name="ce424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[.C133]&lt;&gt;&quot;&quot;)" style:apply-style-name="ConditionalStyle_5f_1" style:base-cell-address="'Amortización de Préstamos'.C133"/>
    </style:style>
    <style:style style:name="ce425" style:family="table-cell" style:parent-style-name="Normal_20_2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[.C48]&lt;&gt;&quot;&quot;)" style:apply-style-name="ConditionalStyle_5f_4" style:base-cell-address="'Amortización de Préstamos'.C48"/>
    </style:style>
    <style:style style:name="ce426" style:family="table-cell" style:parent-style-name="Normal_20_2_20_2" style:data-style-name="N4">
      <style:table-cell-properties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Porcentaje_20_2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Normal_20_2_20_2" style:data-style-name="N3">
      <style:table-cell-properties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Porcentaje_20_2" style:data-style-name="N14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430" style:family="table-cell" style:parent-style-name="Millares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431" style:family="table-cell" style:parent-style-name="Millares_20_2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Moneda_20_2" style:data-style-name="N142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[.$C$13]=0)" style:apply-style-name="ConditionalStyle_5f_2" style:base-cell-address="'Amortización de Préstamos'.C13"/>
    </style:style>
    <style:style style:name="ce433" style:family="table-cell" style:parent-style-name="Moneda_20_2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ROW()&lt;COUNTIF([.$C:.$C];&quot;&gt;0&quot;)+14)" style:apply-style-name="ConditionalStyle_5f_3" style:base-cell-address="'Amortización de Préstamos'.C13"/>
    </style:style>
    <style:style style:name="ce434" style:family="table-cell" style:parent-style-name="Normal_20_2_20_2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[.C48]&lt;&gt;&quot;&quot;)" style:apply-style-name="ConditionalStyle_5f_4" style:base-cell-address="'Amortización de Préstamos'.C48"/>
    </style:style>
    <style:style style:name="ce435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436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ce437" style:family="table-cell" style:parent-style-name="Normal_20_2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81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Normal_20_2_20_2" style:data-style-name="N142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[.$C$13]=0)" style:apply-style-name="ConditionalStyle_5f_2" style:base-cell-address="'Amortización de Préstamos'.C13"/>
    </style:style>
    <style:style style:name="ce439" style:family="table-cell" style:parent-style-name="Normal_20_2_20_2" style:data-style-name="N14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  <style:map style:condition="is-true-formula(ROW()&lt;COUNTIF([.$C:.$C];&quot;&gt;0&quot;)+14)" style:apply-style-name="ConditionalStyle_5f_3" style:base-cell-address="'Amortización de Préstamos'.C13"/>
    </style:style>
    <style:style style:name="ce440" style:family="table-cell" style:parent-style-name="Moneda_20_2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2f2f2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9500"/>
        </loext:border-bottom-complex-color>
        <loext:border-left-complex-color loext:theme-type="light1" loext:color-type="theme">
          <loext:transformation loext:type="lummod" loext:value="9500"/>
        </loext:border-left-complex-color>
        <loext:border-right-complex-color loext:theme-type="light1" loext:color-type="theme">
          <loext:transformation loext:type="lummod" loext:value="9500"/>
        </loext:border-right-complex-color>
        <loext:border-top-complex-color loext:theme-type="light1" loext:color-type="theme">
          <loext:transformation loext:type="lummod" loext:value="9500"/>
        </loext:border-top-complex-color>
      </style:table-cell-properties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441" style:family="table-cell" style:parent-style-name="Normal_20_2_20_2" style:data-style-name="N4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Normal_20_2_20_2" style:data-style-name="N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Normal_20_2_20_2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Normal_20_2_20_2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accent1" loext:color-type="theme"/>
      </style:text-properties>
    </style:style>
    <style:style style:name="ce446" style:family="table-cell" style:parent-style-name="Normal_20_5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7" style:family="table-cell" style:parent-style-name="Normal_20_5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2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 style:data-style-name="N13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Default" style:data-style-name="N13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fo:border-bottom="0.74pt solid #000000" fo:background-color="#4bacc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75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Normal_20_2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Normal_20_2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Normal_20_2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Normal_20_2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Normal_20_2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Normal_20_6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Normal_20_6">
      <style:table-cell-properties fo:border-bottom="0.74pt solid #000000" fo:background-color="#4bac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8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89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Normal_20_6">
      <style:table-cell-properties fo:border-bottom="0.74pt solid #000000" fo:background-color="#4bac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Normal_20_6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Normal_20_6">
      <style:table-cell-properties fo:border-bottom="0.74pt solid #000000" fo:background-color="#4bacc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Normal_20_6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Normal_20_6">
      <style:table-cell-properties fo:border-bottom="none" fo:background-color="#4bac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99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Normal_20_6" style:data-style-name="N11">
      <style:table-cell-properties fo:border-bottom="0.74pt solid #000000" fo:background-color="#4bac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01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3" style:family="table-cell" style:parent-style-name="Normal_20_6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Normal_20_6">
      <style:table-cell-properties fo:border-bottom="0.74pt solid #000000" fo:background-color="#4bacc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Normal_20_6">
      <style:table-cell-properties fo:background-color="#4bacc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06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7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8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9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 Symbol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0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1" style:family="table-cell" style:parent-style-name="Normal_20_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2" style:family="table-cell" style:parent-style-name="Normal_20_6">
      <style:table-cell-properties fo:border-bottom="0.74pt solid #000000" fo:background-color="#00b0f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3" style:family="table-cell" style:parent-style-name="Normal_20_6">
      <style:table-cell-properties fo:background-color="#dbe5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4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 Symbol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5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 Symbol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6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 Symbol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Normal_20_6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8" style:family="table-cell" style:parent-style-name="Normal_20_6">
      <style:table-cell-properties fo:border-bottom="1.76pt solid #000000" fo:background-color="#4bacc6" style:diagonal-bl-tr="none" style:diagonal-tl-br="none" fo:border-left="none" fo:border-right="none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Normal_20_6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Normal_20_6" style:data-style-name="N14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Normal_20_6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Normal_20_6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Normal_20_6" style:data-style-name="N11">
      <style:table-cell-properties fo:border-bottom="0.74pt solid #000000" fo:background-color="#00b0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24" style:family="table-cell" style:parent-style-name="Normal_20_6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Normal_20_6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Normal_20_6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27" style:family="table-cell" style:parent-style-name="Normal_20_6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Normal_20_6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Normal_20_6" style:data-style-name="N144">
      <style:table-cell-properties fo:background-color="#4bac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30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Normal_20_6">
      <style:table-cell-properties fo:border-bottom="1.76pt solid #000000" fo:background-color="#4bacc6" style:diagonal-bl-tr="none" style:diagonal-tl-br="none" fo:border-left="none" fo:border-right="1.76pt solid #000000" style:rotation-align="none" fo:border-top="1.76pt solid #000000">
        <loext:background-complex-color loext:theme-type="accent5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Normal_20_6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Normal_20_6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35" style:family="table-cell" style:parent-style-name="Normal_20_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6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7" style:family="table-cell" style:parent-style-name="Normal_20_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8" style:family="table-cell" style:parent-style-name="Normal_20_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9" style:family="table-cell" style:parent-style-name="Normal_20_6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0" style:family="table-cell" style:parent-style-name="Normal_20_6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Normal_20_6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Normal_20_6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Normal_20_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Normal_20_6" style:data-style-name="N11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45" style:family="table-cell" style:parent-style-name="Normal_20_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rotation-align="none"/>
    </style:style>
    <style:style style:name="ce54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54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6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1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62" style:family="table-cell" style:parent-style-name="Excel_20_Built-in_20_Comma" style:data-style-name="N148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566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149">
      <style:table-cell-properties fo:background-color="#ffff00" style:rotation-align="none"/>
    </style:style>
    <style:style style:name="ce568" style:family="table-cell" style:parent-style-name="Default" style:data-style-name="N15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</style:style>
    <style:style style:name="ce57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5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5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9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Normal_20_2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Normal_20_2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Normal_20_2" style:data-style-name="N13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Normal_20_2">
      <style:table-cell-properties fo:border-bottom="1.76pt solid #000000" fo:background-color="#b8cce4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4" style:family="table-cell" style:parent-style-name="Normal_20_2" style:data-style-name="N147">
      <style:table-cell-properties fo:border-bottom="0.74pt solid #000000" fo:background-color="#d6e3b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Normal_20_2">
      <style:table-cell-properties fo:border-bottom="1.76pt solid #000000" fo:background-color="#e5dfe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6" style:family="table-cell" style:parent-style-name="Normal_20_2">
      <style:table-cell-properties fo:border-bottom="none" fo:background-color="#b8cce4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7" style:family="table-cell" style:parent-style-name="Normal_20_2" style:data-style-name="N145">
      <style:table-cell-properties fo:border-bottom="0.74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8" style:family="table-cell" style:parent-style-name="Normal_20_2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9" style:family="table-cell" style:parent-style-name="Normal_20_2">
      <style:table-cell-properties fo:border-bottom="1.76pt solid #000000" fo:background-color="#e5df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90" style:family="table-cell" style:parent-style-name="Normal_20_2" style:data-style-name="N145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91" style:family="table-cell" style:parent-style-name="Normal_20_2" style:data-style-name="N145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92" style:family="table-cell" style:parent-style-name="Normal_20_2">
      <style:table-cell-properties fo:background-color="#b8cce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93" style:family="table-cell" style:parent-style-name="Normal_20_2" style:data-style-name="N3">
      <style:table-cell-properties fo:border-bottom="0.74pt solid #000000" fo:background-color="#d6e3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4" style:family="table-cell" style:parent-style-name="Normal_20_2">
      <style:table-cell-properties fo:border-bottom="none" fo:background-color="#b8cce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95" style:family="table-cell" style:parent-style-name="Normal_20_2" style:data-style-name="N3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Normal_20_2" style:data-style-name="N3">
      <style:table-cell-properties fo:background-color="#d6e3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7" style:family="table-cell" style:parent-style-name="Normal_20_2" style:data-style-name="N3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8" style:family="table-cell" style:parent-style-name="Normal_20_2" style:data-style-name="N3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99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Normal_20_2" style:data-style-name="N3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Normal_20_2" style:data-style-name="N3">
      <style:table-cell-properties fo:border-bottom="0.74pt solid #000000" fo:background-color="#d6e3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Normal_20_2" style:data-style-name="N3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Normal_20_2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4" style:family="table-cell" style:parent-style-name="Normal_20_2">
      <style:table-cell-properties fo:border-bottom="1.76pt solid #000000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05" style:family="table-cell" style:parent-style-name="Normal_20_2" style:data-style-name="N11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6" style:family="table-cell" style:parent-style-name="Normal_20_2">
      <style:table-cell-properties fo:border-bottom="none" fo:background-color="#b8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07" style:family="table-cell" style:parent-style-name="Normal_20_2" style:data-style-name="N10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8" style:family="table-cell" style:parent-style-name="Normal_20_2" style:data-style-name="N10">
      <style:table-cell-properties fo:background-color="#d6e3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09" style:family="table-cell" style:parent-style-name="Normal_20_2" style:data-style-name="N135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Normal_20_2" style:data-style-name="N11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1" style:family="table-cell" style:parent-style-name="Normal_20_2" style:data-style-name="N11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Normal_20_2" style:data-style-name="N135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3" style:family="table-cell" style:parent-style-name="Normal_20_2" style:data-style-name="N1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Normal_20_2" style:data-style-name="N10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5" style:family="table-cell" style:parent-style-name="Normal_20_2" style:data-style-name="N135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6" style:family="table-cell" style:parent-style-name="Normal_20_2" style:data-style-name="N136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Normal_20_2" style:data-style-name="N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8" style:family="table-cell" style:parent-style-name="Normal_20_2" style:data-style-name="N3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Normal_20_2" style:data-style-name="N3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0" style:family="table-cell" style:parent-style-name="Normal_20_2">
      <style:table-cell-properties fo:border-bottom="1.76pt solid #000000" fo:background-color="#b8cce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21" style:family="table-cell" style:parent-style-name="Normal_20_2" style:data-style-name="N11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2" style:family="table-cell" style:parent-style-name="Normal_20_2">
      <style:table-cell-properties fo:border-bottom="none" fo:background-color="#b8cce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23" style:family="table-cell" style:parent-style-name="Normal_20_2" style:data-style-name="N10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4" style:family="table-cell" style:parent-style-name="Normal_20_2" style:data-style-name="N10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5" style:family="table-cell" style:parent-style-name="Normal_20_2" style:data-style-name="N135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6" style:family="table-cell" style:parent-style-name="Normal_20_2" style:data-style-name="N11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7" style:family="table-cell" style:parent-style-name="Normal_20_2" style:data-style-name="N11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8" style:family="table-cell" style:parent-style-name="Normal_20_2" style:data-style-name="N135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9" style:family="table-cell" style:parent-style-name="Normal_20_2" style:data-style-name="N1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Normal_20_2" style:data-style-name="N10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1" style:family="table-cell" style:parent-style-name="Normal_20_2" style:data-style-name="N135">
      <style:table-cell-properties fo:border-bottom="0.74pt solid #000000" fo:background-color="#d6e3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32" style:family="table-cell" style:parent-style-name="Default">
      <style:table-cell-properties style:diagonal-bl-tr="none" style:diagonal-tl-br="none" fo:border="none" style:rotation-align="none"/>
    </style:style>
    <style:style style:name="ce6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634" style:family="table-cell" style:parent-style-name="Default" style:data-style-name="N133">
      <style:table-cell-properties style:diagonal-bl-tr="none" style:diagonal-tl-br="none" fo:border="none" style:rotation-align="none"/>
    </style:style>
    <style:style style:name="ce635" style:family="table-cell" style:parent-style-name="Default" style:data-style-name="N2">
      <style:table-cell-properties style:diagonal-bl-tr="none" style:diagonal-tl-br="none" fo:border="none" style:rotation-align="none"/>
    </style:style>
    <style:style style:name="ce636" style:family="table-cell" style:parent-style-name="Default" style:data-style-name="N1">
      <style:table-cell-properties style:diagonal-bl-tr="none" style:diagonal-tl-br="none" fo:border="none" style:rotation-align="none"/>
    </style:style>
    <style:style style:name="ce637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38" style:family="table-cell" style:parent-style-name="Default" style:data-style-name="N11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63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0" style:family="table-cell" style:parent-style-name="Default" style:data-style-name="N133">
      <style:table-cell-properties fo:background-color="#c0c0c0" style:diagonal-bl-tr="none" style:diagonal-tl-br="none" fo:border="none" style:rotation-align="none"/>
    </style:style>
    <style:style style:name="ce641" style:family="table-cell" style:parent-style-name="Default" style:data-style-name="N2">
      <style:table-cell-properties fo:background-color="#c0c0c0" style:diagonal-bl-tr="none" style:diagonal-tl-br="none" fo:border="none" style:rotation-align="none"/>
    </style:style>
    <style:style style:name="ce642" style:family="table-cell" style:parent-style-name="Default">
      <style:table-cell-properties fo:background-color="#c0c0c0" style:diagonal-bl-tr="none" style:diagonal-tl-br="none" fo:border="none" style:rotation-align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3cm, 10.843cm, 3.305cm, 11.086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35cm" svg:stroke-color="#3a5f8b" draw:stroke-linejoin="miter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27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9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4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6" style:family="graphic" style:parent-style-name="Default">
      <style:graphic-properties draw:stroke="none" svg:stroke-width="0cm" draw:fill="solid" draw:fill-color="#00b050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7" style:family="graphic" style:parent-style-name="Default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1cm" fo:padding-right="0.1cm" fo:wrap-option="wra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8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282cm, 16.902cm, 4.813cm, 4.657cm)" draw:image-opacity="100%" style:mirror="none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solid" svg:stroke-width="0.035cm" svg:stroke-color="#3a5f8b" draw:stroke-linejoin="miter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 fo:margin-left="0cm" fo:margin-right="0cm" fo:margin-top="0cm" fo:margin-bottom="0cm" fo:line-height="10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gr10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s" fo:country="PE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30pt" fo:letter-spacing="normal" fo:language="es" fo:country="E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text-position="0% 100%" fo:font-family="'Trebuchet MS'" style:font-family-generic="swiss" style:font-pitch="variable" fo:font-size="10pt" fo:letter-spacing="normal" fo:language="es" fo:country="AR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1" fo:font-size="10pt" fo:letter-spacing="normal" fo:language="es" fo:country="AR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8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Calibri1" fo:font-size="10pt" fo:letter-spacing="normal" fo:language="es" fo:country="AR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light1" loext:color-type="theme">
          <loext:transformation loext:type="lummod" loext:value="8500"/>
        </loext:char-complex-color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1" fo:font-size="10pt" fo:letter-spacing="normal" fo:language="es" fo:country="AR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10pt" fo:letter-spacing="normal" fo:language="es" fo:country="AR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1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1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16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Symbol"/>
    </style:style>
    <style:style style:name="T1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20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21" style:family="text">
      <style:text-properties fo:color="#000000" style:font-name="Noto Sans Symbol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24" style:family="text">
      <style:text-properties fo:color="#000000" style:font-name="Noto Sans Symbols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text-position="sub 58%" style:font-name-complex="Arial1"/>
    </style:style>
    <style:style style:name="T2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font-name-complex="Arial1" style:text-position="0% 100%"/>
    </style:style>
    <style:style style:name="T2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2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1" style:font-name-complex="Arial1" style:text-position="sub 58%"/>
    </style:style>
    <style:style style:name="T29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1" style:font-name-complex="Arial1" fo:font-weight="normal" style:text-position="0% 100%" style:font-weight-asian="normal" style:font-weight-complex="normal"/>
    </style:style>
    <style:style style:name="T3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Arial1" style:font-name-complex="Arial1"/>
    </style:style>
    <style:style style:name="T3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Arial1" style:text-position="sub 58%" style:font-name-complex="Arial1"/>
    </style:style>
    <style:style style:name="T3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3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sub 58%"/>
    </style:style>
    <style:style style:name="T3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35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0pt" style:font-size-asian="10pt" style:font-size-complex="10pt"/>
    </style:style>
    <style:style style:name="T36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37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38" style:family="text">
      <style:text-properties fo:color="#000000" style:font-name="Times New Roman" fo:font-size="12pt" fo:font-weight="bold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style:font-weight-asian="bold" style:font-weight-complex="bold" fo:font-style="italic" style:font-style-asian="italic" style:font-style-complex="italic"/>
    </style:style>
    <style:style style:name="T39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40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normal" style:font-weight-asian="normal" style:font-weight-complex="normal"/>
    </style:style>
    <style:style style:name="T41" style:family="text">
      <style:text-properties fo:color="#000000" style:font-name="Times New Roman1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bold" style:font-weight-complex="bold" style:font-style-asian="normal" style:font-style-complex="normal"/>
    </style:style>
    <style:style style:name="T42" style:family="text">
      <style:text-properties fo:color="#000000" style:font-name="Times New Roman1" fo:font-weight="bold" style:text-underline-style="none" style:text-underline-color="font-color" style:text-line-through-type="none" fo:font-style="normal" style:text-outline="false" fo:text-shadow="none" style:text-position="0% 100%" style:font-name-complex="Times New Roman1" style:font-weight-asian="bold" style:font-weight-complex="bold" style:font-style-asian="normal" style:font-style-complex="normal" fo:font-size="18pt" style:font-size-asian="18pt" style:font-size-complex="18pt"/>
    </style:style>
    <style:style style:name="T43" style:family="text">
      <style:text-properties fo:color="#000000" style:font-name="Times New Roman1" fo:font-weight="bold" style:text-line-through-type="none" fo:font-style="normal" style:text-outline="false" fo:text-shadow="none" style:text-position="0% 100%" style:font-name-complex="Times New Roman1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44" style:family="text">
      <style:text-properties fo:color="#000000" style:font-name="Times New Roman1" fo:font-weight="bold" style:text-line-through-type="none" fo:font-style="normal" style:text-outline="false" fo:text-shadow="none" style:text-position="0% 100%" style:font-name-complex="Times New Roman1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45" style:family="text">
      <style:text-properties fo:color="#000000" style:font-name="Times New Roman1" fo:font-weight="bold" style:text-line-through-type="none" fo:font-style="normal" style:text-outline="false" fo:text-shadow="none" style:text-position="0% 100%" style:font-name-complex="Times New Roman1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  <style:style style:name="T46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7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4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Mensual&quot;;&quot;Bimensual&quot;;&quot;Trimestral&quot;;&quot;Cuatrimestral&quot;;&quot;Semestral&quot;;&quot;Anual&quot;)" table:allow-empty-cell="true" table:display-list="unsorted" table:base-cell-address="Sensibilidad.D6">
          <table:help-message table:display="true"/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Resumen del escenario 3" table:style-name="ta3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-group>
          <table:table-column table:style-name="co3" table:number-columns-repeated="3" table:default-cell-style-name="Default"/>
        </table:table-column-group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ce2" office:value-type="string" calcext:value-type="string">
            <text:p>Resumen del escenario</text:p>
          </table:table-cell>
          <table:table-cell table:style-name="ce2"/>
          <table:table-cell table:style-name="ce7" table:number-columns-repeated="3"/>
          <table:table-cell table:number-columns-repeated="16378"/>
        </table:table-row>
        <table:table-row table:style-name="ro2">
          <table:table-cell/>
          <table:table-cell table:style-name="ce3" table:number-columns-repeated="2"/>
          <table:table-cell table:style-name="ce8" office:value-type="string" calcext:value-type="string">
            <text:p>Valores actuales:</text:p>
          </table:table-cell>
          <table:table-cell table:style-name="ce8" office:value-type="string" calcext:value-type="string">
            <text:p>OPTIMISTA</text:p>
          </table:table-cell>
          <table:table-cell table:style-name="ce8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3" table:visibility="collapse">
            <table:table-cell table:number-columns-repeated="3"/>
            <table:table-cell table:style-name="ce9"/>
            <table:table-cell table:number-columns-repeated="2" table:style-name="ce16" office:value-type="string" calcext:value-type="string">
              <text:p>Creado por User el 21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cambiantes:</text:p>
          </table:table-cell>
          <table:table-cell table:style-name="ce5"/>
          <table:table-cell table:style-name="ce10" table:number-columns-repeated="3"/>
          <table:table-cell table:number-columns-repeated="16378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Valor_de_venta</text:p>
            </table:table-cell>
            <table:table-cell table:style-name="ce11" office:value-type="float" office:value="28.5" calcext:value-type="float">
              <text:p><text:s/>28.50 </text:p>
            </table:table-cell>
            <table:table-cell table:style-name="ce17" office:value-type="float" office:value="29" calcext:value-type="float">
              <text:p><text:s/>29.00 </text:p>
            </table:table-cell>
            <table:table-cell table:style-name="ce17" office:value-type="float" office:value="27.5" calcext:value-type="float">
              <text:p><text:s/>27.50 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Valor_Mano_Obra</text:p>
            </table:table-cell>
            <table:table-cell table:style-name="ce12" office:value-type="float" office:value="8.33" calcext:value-type="float">
              <text:p>8.33</text:p>
            </table:table-cell>
            <table:table-cell table:style-name="ce18" office:value-type="float" office:value="7.9" calcext:value-type="float">
              <text:p>7.90</text:p>
            </table:table-cell>
            <table:table-cell table:style-name="ce18" office:value-type="float" office:value="10" calcext:value-type="float">
              <text:p>10.00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Valor_del_Rocoto</text:p>
            </table:table-cell>
            <table:table-cell table:style-name="ce9" office:value-type="float" office:value="0.133" calcext:value-type="float">
              <text:p>0.133</text:p>
            </table:table-cell>
            <table:table-cell table:style-name="ce19" office:value-type="float" office:value="0.12" calcext:value-type="float">
              <text:p>0.12</text:p>
            </table:table-cell>
            <table:table-cell table:style-name="ce19" office:value-type="float" office:value="0.2" calcext:value-type="float">
              <text:p>0.2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de resultado:</text:p>
          </table:table-cell>
          <table:table-cell table:style-name="ce5"/>
          <table:table-cell table:style-name="ce10" table:number-columns-repeated="3"/>
          <table:table-cell table:number-columns-repeated="16378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VANE</text:p>
            </table:table-cell>
            <table:table-cell table:style-name="ce13" office:value-type="float" office:value="17760.5839412296" calcext:value-type="float">
              <text:p>17761</text:p>
            </table:table-cell>
            <table:table-cell table:style-name="ce13" office:value-type="float" office:value="19823.3840673674" calcext:value-type="float">
              <text:p>19823</text:p>
            </table:table-cell>
            <table:table-cell table:style-name="ce13" office:value-type="float" office:value="13182.3548842981" calcext:value-type="float">
              <text:p>13182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TIRE</text:p>
            </table:table-cell>
            <table:table-cell table:style-name="ce14" office:value-type="percentage" office:value="0.954244699055659" calcext:value-type="percentage">
              <text:p>95.42 %</text:p>
            </table:table-cell>
            <table:table-cell table:style-name="ce14" office:value-type="percentage" office:value="1.04700501235466" calcext:value-type="percentage">
              <text:p>104.70 %</text:p>
            </table:table-cell>
            <table:table-cell table:style-name="ce14" office:value-type="percentage" office:value="0.757654820397411" calcext:value-type="percentage">
              <text:p>75.77 %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VANF</text:p>
            </table:table-cell>
            <table:table-cell table:style-name="ce13" office:value-type="float" office:value="17783.8941213818" calcext:value-type="float">
              <text:p>17784</text:p>
            </table:table-cell>
            <table:table-cell table:style-name="ce13" office:value-type="float" office:value="19846.6942475195" calcext:value-type="float">
              <text:p>19847</text:p>
            </table:table-cell>
            <table:table-cell table:style-name="ce13" office:value-type="float" office:value="13205.6650644503" calcext:value-type="float">
              <text:p>13206</text:p>
            </table:table-cell>
            <table:table-cell table:number-columns-repeated="16378"/>
          </table:table-row>
          <table:table-row table:style-name="ro1">
            <table:table-cell/>
            <table:table-cell table:style-name="ce6"/>
            <table:table-cell table:style-name="ce6" office:value-type="string" calcext:value-type="string">
              <text:p>TIRF</text:p>
            </table:table-cell>
            <table:table-cell table:style-name="ce15" office:value-type="percentage" office:value="0.956165873741603" calcext:value-type="percentage">
              <text:p>95.62 %</text:p>
            </table:table-cell>
            <table:table-cell table:style-name="ce15" office:value-type="percentage" office:value="1.04907814954458" calcext:value-type="percentage">
              <text:p>104.91 %</text:p>
            </table:table-cell>
            <table:table-cell table:style-name="ce15" office:value-type="percentage" office:value="0.75924034560252" calcext:value-type="percentage">
              <text:p>75.92 %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Default" office:value-type="string" calcext:value-type="string">
            <text:p>Notas: La columna de valores actuales representa los valores de las celdas cambiante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en el momento en que se creó el Informe resumen de escenario. Las celdas cambiantes d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cada escenario se muestran en gris.</text:p>
          </table:table-cell>
          <table:table-cell table:style-name="Default"/>
          <table:table-cell table:number-columns-repeated="16381"/>
        </table:table-row>
      </table:table>
      <table:table table:name="DATOS" table:style-name="ta4">
        <office:forms form:automatic-focus="false" form:apply-design-mode="false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11" table:default-cell-style-name="ce20"/>
        <table:table-column table:style-name="co14" table:number-columns-repeated="16364" table:default-cell-style-name="ce20"/>
        <table:table-row table:style-name="ro4">
          <table:table-cell table:number-columns-repeated="16384"/>
        </table:table-row>
        <table:table-row table:style-name="ro4">
          <table:table-cell/>
          <table:table-cell table:style-name="ce21" office:value-type="string" calcext:value-type="string" table:number-columns-spanned="8" table:number-rows-spanned="1">
            <text:p>EXAMEN PARCIAL DE EVALUACIÓN PRIVADA DE PROYECTOS EC-448</text:p>
          </table:table-cell>
          <table:covered-table-cell table:number-columns-repeated="7" table:style-name="ce21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table:style-name="ce22" office:value-type="string" calcext:value-type="string" table:number-columns-spanned="3" table:number-rows-spanned="1">
            <text:p>APELLIDOS Y NOMBRES:</text:p>
          </table:table-cell>
          <table:covered-table-cell table:number-columns-repeated="2" table:style-name="ce22"/>
          <table:table-cell table:style-name="ce43" table:number-columns-spanned="5" table:number-rows-spanned="1"/>
          <table:covered-table-cell table:number-columns-repeated="4" table:style-name="ce43"/>
          <table:table-cell table:number-columns-repeated="16375"/>
        </table:table-row>
        <table:table-row table:style-name="ro6">
          <table:table-cell/>
          <table:table-cell table:style-name="ce23" office:value-type="string" calcext:value-type="string" table:number-columns-spanned="3" table:number-rows-spanned="1">
            <text:p>TURNO:</text:p>
          </table:table-cell>
          <table:covered-table-cell table:number-columns-repeated="2" table:style-name="ce23"/>
          <table:table-cell table:style-name="ce43" table:number-columns-spanned="5" table:number-rows-spanned="1"/>
          <table:covered-table-cell table:number-columns-repeated="4" table:style-name="ce43"/>
          <table:table-cell table:number-columns-repeated="16375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24" office:value-type="string" calcext:value-type="string" table:number-columns-spanned="4" table:number-rows-spanned="1">
            <text:p>MODELO FINANCIERO</text:p>
          </table:table-cell>
          <table:covered-table-cell table:number-columns-repeated="2" table:style-name="ce33"/>
          <table:covered-table-cell table:style-name="ce44"/>
          <table:table-cell/>
          <table:table-cell table:style-name="ce54" office:value-type="string" calcext:value-type="string">
            <text:p>Inflacion USA</text:p>
          </table:table-cell>
          <table:table-cell table:style-name="ce57" office:value-type="percentage" office:value="0.02" calcext:value-type="percentage">
            <text:p>2 %</text:p>
          </table:table-cell>
          <table:table-cell table:style-name="ce54" office:value-type="string" calcext:value-type="string">
            <text:p>promedio anual</text:p>
          </table:table-cell>
          <table:table-cell table:number-columns-repeated="16375"/>
        </table:table-row>
        <table:table-row table:style-name="ro4">
          <table:table-cell/>
          <table:table-cell table:style-name="ce25"/>
          <table:table-cell table:style-name="ce34" table:number-columns-repeated="2"/>
          <table:table-cell table:style-name="ce45"/>
          <table:table-cell/>
          <table:table-cell table:style-name="ce54" office:value-type="string" calcext:value-type="string">
            <text:p>Precio dólar enero </text:p>
          </table:table-cell>
          <table:table-cell table:style-name="ce58" office:value-type="float" office:value="3.7" calcext:value-type="float">
            <text:p><text:s/>3.70 </text:p>
          </table:table-cell>
          <table:table-cell table:style-name="ce54" office:value-type="string" calcext:value-type="string">
            <text:p>soles/dólar</text:p>
          </table:table-cell>
          <table:table-cell table:number-columns-repeated="16375"/>
        </table:table-row>
        <table:table-row table:style-name="ro4">
          <table:table-cell/>
          <table:table-cell table:style-name="ce26" office:value-type="string" calcext:value-type="string" table:number-columns-spanned="4" table:number-rows-spanned="1">
            <text:p>EVALUACION ECONOMICA</text:p>
          </table:table-cell>
          <table:covered-table-cell table:number-columns-repeated="2" table:style-name="ce35"/>
          <table:covered-table-cell table:style-name="ce46"/>
          <table:table-cell/>
          <table:table-cell table:style-name="ce54" office:value-type="string" calcext:value-type="string">
            <text:p>Precio dólar diciembre</text:p>
          </table:table-cell>
          <table:table-cell table:style-name="ce59" office:value-type="float" office:value="3.8" calcext:value-type="float">
            <text:p>3.80</text:p>
          </table:table-cell>
          <table:table-cell table:style-name="ce54" office:value-type="string" calcext:value-type="string">
            <text:p>soles/dólar</text:p>
          </table:table-cell>
          <table:table-cell table:style-name="ce66" table:number-columns-repeated="2"/>
          <table:table-cell table:number-columns-repeated="16373"/>
        </table:table-row>
        <table:table-row table:style-name="ro4">
          <table:table-cell/>
          <table:table-cell table:style-name="ce27" office:value-type="string" calcext:value-type="string" table:number-columns-spanned="4" table:number-rows-spanned="1">
            <text:p>Y FINANCIERA DE INVERSIONES</text:p>
          </table:table-cell>
          <table:covered-table-cell table:number-columns-repeated="2" table:style-name="ce36"/>
          <table:covered-table-cell table:style-name="ce47"/>
          <table:table-cell/>
          <table:table-cell table:style-name="ce54" office:value-type="string" calcext:value-type="string">
            <text:p>TEA en dolares</text:p>
          </table:table-cell>
          <table:table-cell table:style-name="ce60" table:formula="of:=[$'j) cronograma deuda'.E7]" office:value-type="percentage" office:value="0.23" calcext:value-type="percentage">
            <text:p>23.0%</text:p>
          </table:table-cell>
          <table:table-cell table:style-name="ce54" office:value-type="string" calcext:value-type="string">
            <text:p>anual</text:p>
          </table:table-cell>
          <table:table-cell table:style-name="ce66" office:value-type="string" calcext:value-type="string">
            <text:p>OPTIMISTA</text:p>
          </table:table-cell>
          <table:table-cell table:style-name="ce66" office:value-type="string" calcext:value-type="string">
            <text:p>PESIMISTA</text:p>
          </table:table-cell>
          <table:table-cell table:number-columns-repeated="16373"/>
        </table:table-row>
        <table:table-row table:style-name="ro4">
          <table:table-cell/>
          <table:table-cell table:style-name="ce28"/>
          <table:table-cell table:style-name="ce36" table:number-columns-repeated="2"/>
          <table:table-cell table:style-name="ce47"/>
          <table:table-cell/>
          <table:table-cell table:style-name="ce54" office:value-type="string" calcext:value-type="string">
            <text:p>Horizonte de evaluación</text:p>
          </table:table-cell>
          <table:table-cell table:style-name="ce61" office:value-type="float" office:value="3" calcext:value-type="float">
            <text:p><text:s/>3 </text:p>
          </table:table-cell>
          <table:table-cell table:style-name="ce54" office:value-type="string" calcext:value-type="string">
            <text:p>años</text:p>
          </table:table-cell>
          <table:table-cell table:style-name="ce66" table:number-columns-repeated="2"/>
          <table:table-cell table:number-columns-repeated="16373"/>
        </table:table-row>
        <table:table-row table:style-name="ro4">
          <table:table-cell/>
          <table:table-cell table:style-name="ce26" table:number-columns-spanned="4" table:number-rows-spanned="1"/>
          <table:covered-table-cell table:number-columns-repeated="2" table:style-name="ce35"/>
          <table:covered-table-cell table:style-name="ce46"/>
          <table:table-cell/>
          <table:table-cell table:style-name="ce55" office:value-type="string" calcext:value-type="string">
            <text:p>Impuesto I</text:p>
          </table:table-cell>
          <table:table-cell table:style-name="ce62" office:value-type="percentage" office:value="0.1" calcext:value-type="percentage">
            <text:p>10 %</text:p>
          </table:table-cell>
          <table:table-cell table:style-name="ce55" office:value-type="string" calcext:value-type="string">
            <text:p>0-S/. 66,000</text:p>
          </table:table-cell>
          <table:table-cell table:style-name="ce67" table:formula="of:=66000/[.H8]" office:value-type="float" office:value="17837.8378378378" calcext:value-type="float">
            <text:p><text:s/>17,837.84 </text:p>
          </table:table-cell>
          <table:table-cell table:style-name="ce73"/>
          <table:table-cell table:number-columns-repeated="16373"/>
        </table:table-row>
        <table:table-row table:style-name="ro7">
          <table:table-cell/>
          <table:table-cell table:style-name="ce29"/>
          <table:table-cell table:style-name="ce37" table:number-columns-repeated="2"/>
          <table:table-cell table:style-name="ce48"/>
          <table:table-cell/>
          <table:table-cell table:style-name="ce54" office:value-type="string" calcext:value-type="string">
            <text:p>Impuesto II</text:p>
          </table:table-cell>
          <table:table-cell table:style-name="ce60" office:value-type="percentage" office:value="0.295" calcext:value-type="percentage">
            <text:p>29.5%</text:p>
          </table:table-cell>
          <table:table-cell table:style-name="ce54" office:value-type="string" calcext:value-type="string">
            <text:p>Mayor a 66,000</text:p>
          </table:table-cell>
          <table:table-cell table:style-name="ce68" table:number-columns-repeated="2"/>
          <table:table-cell table:number-columns-repeated="16373"/>
        </table:table-row>
        <table:table-row table:style-name="ro4">
          <table:table-cell/>
          <table:table-cell table:style-name="ce30" office:value-type="string" calcext:value-type="string">
            <text:p>VANE</text:p>
          </table:table-cell>
          <table:table-cell table:style-name="ce38"/>
          <table:table-cell table:style-name="ce41" office:value-type="string" calcext:value-type="string">
            <text:p>VANF</text:p>
          </table:table-cell>
          <table:table-cell table:style-name="ce49"/>
          <table:table-cell table:style-name="ce52"/>
          <table:table-cell table:style-name="ce54" office:value-type="string" calcext:value-type="string">
            <text:p>Devaluación del dólar</text:p>
          </table:table-cell>
          <table:table-cell table:style-name="ce63" table:formula="of:=([.H9]-[.H8])/[.H8]" office:value-type="percentage" office:value="0.0270270270270269" calcext:value-type="percentage">
            <text:p>2.70 %</text:p>
          </table:table-cell>
          <table:table-cell table:style-name="ce54"/>
          <table:table-cell table:style-name="ce69" table:number-columns-repeated="2"/>
          <table:table-cell table:number-columns-repeated="16373"/>
        </table:table-row>
        <table:table-row table:style-name="ro4">
          <table:table-cell/>
          <table:table-cell table:style-name="ce31"/>
          <table:table-cell table:style-name="ce39" table:number-columns-repeated="2"/>
          <table:table-cell table:style-name="ce50"/>
          <table:table-cell/>
          <table:table-cell table:style-name="ce54" office:value-type="string" calcext:value-type="string">
            <text:p>Riesgo País</text:p>
          </table:table-cell>
          <table:table-cell table:style-name="ce63" office:value-type="percentage" office:value="0.0174" calcext:value-type="percentage">
            <text:p>1.74 %</text:p>
          </table:table-cell>
          <table:table-cell table:style-name="ce54" office:value-type="string" calcext:value-type="string">
            <text:p>promedio 2020</text:p>
          </table:table-cell>
          <table:table-cell table:style-name="ce70" table:number-columns-repeated="2"/>
          <table:table-cell table:number-columns-repeated="16373"/>
        </table:table-row>
        <table:table-row table:style-name="ro7">
          <table:table-cell/>
          <table:table-cell table:style-name="ce32" office:value-type="string" calcext:value-type="string">
            <text:p>TIRE</text:p>
          </table:table-cell>
          <table:table-cell table:style-name="ce40"/>
          <table:table-cell table:style-name="ce42" office:value-type="string" calcext:value-type="string">
            <text:p>TIRF</text:p>
          </table:table-cell>
          <table:table-cell table:style-name="ce51"/>
          <table:table-cell table:style-name="ce53"/>
          <table:table-cell table:style-name="ce54" office:value-type="string" calcext:value-type="string">
            <text:p>Valor del cojin</text:p>
          </table:table-cell>
          <table:table-cell table:style-name="ce58" office:value-type="float" office:value="28.5" calcext:value-type="float">
            <text:p><text:s/>28.50 </text:p>
          </table:table-cell>
          <table:table-cell table:style-name="ce64"/>
          <table:table-cell table:style-name="ce68" table:number-columns-repeated="2"/>
          <table:table-cell table:number-columns-repeated="16373"/>
        </table:table-row>
        <table:table-row table:style-name="ro4">
          <table:table-cell table:number-columns-repeated="6"/>
          <table:table-cell table:style-name="ce56" office:value-type="string" calcext:value-type="string">
            <text:p>Precio de la Lana</text:p>
          </table:table-cell>
          <table:table-cell table:style-name="ce43" office:value-type="float" office:value="0.13" calcext:value-type="float">
            <text:p>0.13</text:p>
          </table:table-cell>
          <table:table-cell table:style-name="ce43"/>
          <table:table-cell table:style-name="ce68" table:number-columns-repeated="2"/>
          <table:table-cell table:number-columns-repeated="16373"/>
        </table:table-row>
        <table:table-row table:style-name="ro4">
          <table:table-cell table:number-columns-repeated="6"/>
          <table:table-cell table:style-name="ce56" office:value-type="string" calcext:value-type="string">
            <text:p>Mano de obra tejedoras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/>
          <table:table-cell table:style-name="ce71" table:number-columns-repeated="2"/>
          <table:table-cell table:number-columns-repeated="16373"/>
        </table:table-row>
        <table:table-row table:style-name="ro4">
          <table:table-cell table:number-columns-repeated="8"/>
          <table:table-cell table:style-name="ce65"/>
          <table:table-cell table:style-name="ce72" table:number-columns-repeated="2"/>
          <table:table-cell table:number-columns-repeated="16373"/>
        </table:table-row>
        <table:table-row table:style-name="ro4">
          <table:table-cell table:number-columns-repeated="9"/>
          <table:table-cell table:style-name="ce71" table:number-columns-repeated="2"/>
          <table:table-cell table:number-columns-repeated="16373"/>
        </table:table-row>
        <table:table-row table:style-name="ro4">
          <table:table-cell table:number-columns-repeated="9"/>
          <table:table-cell table:style-name="ce72" table:number-columns-repeated="2"/>
          <table:table-cell table:number-columns-repeated="16373"/>
        </table:table-row>
        <table:table-row table:style-name="ro4" table:number-rows-repeated="954">
          <table:table-cell table:number-columns-repeated="16384"/>
        </table:table-row>
        <table:table-row table:style-name="ro8" table:number-rows-repeated="104760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TIRE" table:base-cell-address="$Hoja1.$A$1" table:cell-range-address="$DATOS.$C$16"/>
          <table:named-range table:name="TIRF" table:base-cell-address="$Hoja1.$A$1" table:cell-range-address="$DATOS.$E$16"/>
          <table:named-range table:name="Valor_del_Rocoto" table:base-cell-address="$Hoja1.$A$1" table:cell-range-address="$DATOS.$H$16"/>
          <table:named-range table:name="Valor_de_venta" table:base-cell-address="$Hoja1.$A$1" table:cell-range-address="$DATOS.$H$14"/>
          <table:named-range table:name="Valor_Mano_Obra" table:base-cell-address="$Hoja1.$A$1" table:cell-range-address="$DATOS.$H$15"/>
          <table:named-range table:name="VANE" table:base-cell-address="$Hoja1.$A$1" table:cell-range-address="$DATOS.$C$14"/>
          <table:named-range table:name="VANF" table:base-cell-address="$Hoja1.$A$1" table:cell-range-address="$DATOS.$E$14"/>
        </table:named-expressions>
      </table:table>
      <table:table table:name="OPTIMISTA" table:style-name="ta5">
        <table:scenario table:display-border="false" table:border-color="#c0c0c0" table:copy-back="false" table:copy-styles="false" table:copy-formulas="false" table:protected="true" table:is-active="false" table:scenario-ranges="OPTIMISTA.H14:OPTIMISTA.H16" table:comment="Creado por User el 23/02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number-columns-repeated="11" table:default-cell-style-name="ce74"/>
        <table:table-column table:style-name="co14" table:number-columns-repeated="16364" table:default-cell-style-name="ce74"/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4">
          <table:table-cell table:number-columns-repeated="7"/>
          <table:table-cell table:style-name="ce63" office:value-type="percentage" office:value="29" calcext:value-type="percentage">
            <text:p>2900.00 %</text:p>
          </table:table-cell>
          <table:table-cell table:number-columns-repeated="16376"/>
        </table:table-row>
        <table:table-row table:style-name="ro4">
          <table:table-cell table:number-columns-repeated="7"/>
          <table:table-cell table:style-name="ce63" office:value-type="percentage" office:value="7.9" calcext:value-type="percentage">
            <text:p>790.00 %</text:p>
          </table:table-cell>
          <table:table-cell table:number-columns-repeated="16376"/>
        </table:table-row>
        <table:table-row table:style-name="ro7">
          <table:table-cell table:number-columns-repeated="7"/>
          <table:table-cell table:style-name="ce58" office:value-type="float" office:value="0.12" calcext:value-type="float">
            <text:p><text:s/>0.12 </text:p>
          </table:table-cell>
          <table:table-cell table:number-columns-repeated="16376"/>
        </table:table-row>
        <table:table-row table:style-name="ro4" table:number-rows-repeated="959">
          <table:table-cell table:number-columns-repeated="16384"/>
        </table:table-row>
        <table:table-row table:style-name="ro8" table:number-rows-repeated="104760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Mano_de_obra_tejedoras" table:base-cell-address="$OPTIMISTA.$A$1" table:cell-range-address="$OPTIMISTA.$H$18"/>
          <table:named-range table:name="Precio_de_la_Lana" table:base-cell-address="$OPTIMISTA.$A$1" table:cell-range-address="$OPTIMISTA.$H$17"/>
          <table:named-range table:name="TIRE" table:base-cell-address="$OPTIMISTA.$A$1" table:cell-range-address="$OPTIMISTA.$C$16"/>
          <table:named-range table:name="TIRF" table:base-cell-address="$OPTIMISTA.$A$1" table:cell-range-address="$OPTIMISTA.$E$16"/>
          <table:named-range table:name="Valor_del_cojin" table:base-cell-address="$OPTIMISTA.$A$1" table:cell-range-address="$OPTIMISTA.$H$16"/>
          <table:named-range table:name="Valor_del_Rocoto" table:base-cell-address="$OPTIMISTA.$A$1" table:cell-range-address="$OPTIMISTA.$H$16"/>
          <table:named-range table:name="Valor_de_venta" table:base-cell-address="$OPTIMISTA.$A$1" table:cell-range-address="$OPTIMISTA.$H$14"/>
          <table:named-range table:name="Valor_Mano_Obra" table:base-cell-address="$OPTIMISTA.$A$1" table:cell-range-address="$OPTIMISTA.$H$15"/>
          <table:named-range table:name="VANE" table:base-cell-address="$OPTIMISTA.$A$1" table:cell-range-address="$OPTIMISTA.$C$14"/>
          <table:named-range table:name="VANF" table:base-cell-address="$OPTIMISTA.$A$1" table:cell-range-address="$OPTIMISTA.$E$14"/>
        </table:named-expressions>
      </table:table>
      <table:table table:name="PESIMISTA" table:style-name="ta5">
        <table:scenario table:display-border="false" table:border-color="#c0c0c0" table:copy-back="false" table:copy-styles="false" table:copy-formulas="false" table:protected="true" table:is-active="false" table:scenario-ranges="PESIMISTA.H14:PESIMISTA.H16" table:comment="Creado por User el 23/02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number-columns-repeated="11" table:default-cell-style-name="ce74"/>
        <table:table-column table:style-name="co14" table:number-columns-repeated="16364" table:default-cell-style-name="ce74"/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4">
          <table:table-cell table:number-columns-repeated="7"/>
          <table:table-cell table:style-name="ce63" office:value-type="percentage" office:value="23" calcext:value-type="percentage">
            <text:p>2300.00 %</text:p>
          </table:table-cell>
          <table:table-cell table:number-columns-repeated="16376"/>
        </table:table-row>
        <table:table-row table:style-name="ro4">
          <table:table-cell table:number-columns-repeated="7"/>
          <table:table-cell table:style-name="ce63" office:value-type="percentage" office:value="8.33" calcext:value-type="percentage">
            <text:p>833.00 %</text:p>
          </table:table-cell>
          <table:table-cell table:number-columns-repeated="16376"/>
        </table:table-row>
        <table:table-row table:style-name="ro7">
          <table:table-cell table:number-columns-repeated="7"/>
          <table:table-cell table:style-name="ce58" office:value-type="float" office:value="0.133" calcext:value-type="float">
            <text:p><text:s/>0.13 </text:p>
          </table:table-cell>
          <table:table-cell table:number-columns-repeated="16376"/>
        </table:table-row>
        <table:table-row table:style-name="ro4" table:number-rows-repeated="959">
          <table:table-cell table:number-columns-repeated="16384"/>
        </table:table-row>
        <table:table-row table:style-name="ro8" table:number-rows-repeated="104760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Mano_de_obra_tejedoras" table:base-cell-address="$PESIMISTA.$A$1" table:cell-range-address="$PESIMISTA.$H$18"/>
          <table:named-range table:name="Precio_de_la_Lana" table:base-cell-address="$PESIMISTA.$A$1" table:cell-range-address="$PESIMISTA.$H$17"/>
          <table:named-range table:name="TIRE" table:base-cell-address="$PESIMISTA.$A$1" table:cell-range-address="$PESIMISTA.$C$16"/>
          <table:named-range table:name="TIRF" table:base-cell-address="$PESIMISTA.$A$1" table:cell-range-address="$PESIMISTA.$E$16"/>
          <table:named-range table:name="Valor_del_cojin" table:base-cell-address="$PESIMISTA.$A$1" table:cell-range-address="$PESIMISTA.$H$16"/>
          <table:named-range table:name="Valor_del_Rocoto" table:base-cell-address="$PESIMISTA.$A$1" table:cell-range-address="$PESIMISTA.$H$16"/>
          <table:named-range table:name="Valor_de_venta" table:base-cell-address="$PESIMISTA.$A$1" table:cell-range-address="$PESIMISTA.$H$14"/>
          <table:named-range table:name="Valor_Mano_Obra" table:base-cell-address="$PESIMISTA.$A$1" table:cell-range-address="$PESIMISTA.$H$15"/>
          <table:named-range table:name="VANE" table:base-cell-address="$PESIMISTA.$A$1" table:cell-range-address="$PESIMISTA.$C$14"/>
          <table:named-range table:name="VANF" table:base-cell-address="$PESIMISTA.$A$1" table:cell-range-address="$PESIMISTA.$E$14"/>
        </table:named-expressions>
      </table:table>
      <table:table table:name="Resumen del escenario" table:style-name="ta6">
        <table:table-column table:style-name="co13" table:default-cell-style-name="ce20"/>
        <table:table-column table:style-name="co15" table:default-cell-style-name="ce20"/>
        <table:table-column table:style-name="co2" table:default-cell-style-name="ce20"/>
        <table:table-column-group>
          <table:table-column table:style-name="co3" table:number-columns-repeated="3" table:default-cell-style-name="ce20"/>
        </table:table-column-group>
        <table:table-column table:style-name="co13" table:number-columns-repeated="20" table:default-cell-style-name="ce20"/>
        <table:table-column table:style-name="co14" table:number-columns-repeated="16358" table:default-cell-style-name="ce20"/>
        <table:table-row table:style-name="ro7">
          <table:table-cell table:number-columns-repeated="16384"/>
        </table:table-row>
        <table:table-row table:style-name="ro8">
          <table:table-cell/>
          <table:table-cell table:style-name="ce75" office:value-type="string" calcext:value-type="string" table:number-columns-spanned="5" table:number-rows-spanned="1">
            <text:p>Resumen del escenario</text:p>
          </table:table-cell>
          <table:covered-table-cell table:number-columns-repeated="4" table:style-name="ce80"/>
          <table:table-cell table:number-columns-repeated="16378"/>
        </table:table-row>
        <table:table-row table:style-name="ro8">
          <table:table-cell/>
          <table:table-cell table:style-name="ce76" table:number-columns-repeated="2"/>
          <table:table-cell table:style-name="ce81" office:value-type="string" calcext:value-type="string">
            <text:p>PROBABLE</text:p>
          </table:table-cell>
          <table:table-cell table:style-name="ce81" office:value-type="string" calcext:value-type="string">
            <text:p>OPTIMISTA</text:p>
          </table:table-cell>
          <table:table-cell table:style-name="ce81" office:value-type="string" calcext:value-type="string">
            <text:p>PESIMISTA</text:p>
          </table:table-cell>
          <table:table-cell table:number-columns-repeated="16378"/>
        </table:table-row>
        <table:table-row-group table:display="false">
          <table:table-row table:style-name="ro5" table:visibility="collapse">
            <table:table-cell/>
            <table:table-cell table:style-name="ce77" table:number-columns-repeated="2"/>
            <table:table-cell table:style-name="ce82"/>
            <table:table-cell table:number-columns-repeated="2" table:style-name="ce89" office:value-type="string" calcext:value-type="string">
              <text:p>Creado por Usuario el 19/02/2021</text:p>
            </table:table-cell>
            <table:table-cell table:number-columns-repeated="16378"/>
          </table:table-row>
        </table:table-row-group>
        <table:table-row table:style-name="ro4">
          <table:table-cell/>
          <table:table-cell table:style-name="ce78" office:value-type="string" calcext:value-type="string">
            <text:p>Celdas cambiantes:</text:p>
          </table:table-cell>
          <table:table-cell table:style-name="ce78"/>
          <table:table-cell table:style-name="ce83" table:number-columns-repeated="3"/>
          <table:table-cell table:number-columns-repeated="16378"/>
        </table:table-row>
        <table:table-row-group>
          <table:table-row table:style-name="ro4">
            <table:table-cell/>
            <table:table-cell table:style-name="ce77"/>
            <table:table-cell table:style-name="ce77" office:value-type="string" calcext:value-type="string">
              <text:p>Valor_de_venta</text:p>
            </table:table-cell>
            <table:table-cell table:style-name="ce84" office:value-type="float" office:value="12" calcext:value-type="float">
              <text:p><text:s/>12.00 </text:p>
            </table:table-cell>
            <table:table-cell table:style-name="ce84" office:value-type="float" office:value="12.1" calcext:value-type="float">
              <text:p><text:s/>12.10 </text:p>
            </table:table-cell>
            <table:table-cell table:style-name="ce84" office:value-type="float" office:value="11.9" calcext:value-type="float">
              <text:p><text:s/>11.90 </text:p>
            </table:table-cell>
            <table:table-cell table:number-columns-repeated="16378"/>
          </table:table-row>
          <table:table-row table:style-name="ro4">
            <table:table-cell/>
            <table:table-cell table:style-name="ce77"/>
            <table:table-cell table:style-name="ce77" office:value-type="string" calcext:value-type="string">
              <text:p>Valor_Mano_Obra</text:p>
            </table:table-cell>
            <table:table-cell table:style-name="ce85" office:value-type="float" office:value="5" calcext:value-type="float">
              <text:p>5.00</text:p>
            </table:table-cell>
            <table:table-cell table:style-name="ce85" office:value-type="float" office:value="4.9" calcext:value-type="float">
              <text:p>4.90</text:p>
            </table:table-cell>
            <table:table-cell table:style-name="ce85" office:value-type="float" office:value="5.1" calcext:value-type="float">
              <text:p>5.10</text:p>
            </table:table-cell>
            <table:table-cell table:number-columns-repeated="16378"/>
          </table:table-row>
          <table:table-row table:style-name="ro4">
            <table:table-cell/>
            <table:table-cell table:style-name="ce77"/>
            <table:table-cell table:style-name="ce77" office:value-type="string" calcext:value-type="string">
              <text:p>Valor_Rocoto</text:p>
            </table:table-cell>
            <table:table-cell table:style-name="ce82" office:value-type="float" office:value="3.5" calcext:value-type="float">
              <text:p>3.5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4" calcext:value-type="float">
              <text:p>4</text:p>
            </table:table-cell>
            <table:table-cell table:number-columns-repeated="16378"/>
          </table:table-row>
        </table:table-row-group>
        <table:table-row table:style-name="ro4">
          <table:table-cell/>
          <table:table-cell table:style-name="ce78" office:value-type="string" calcext:value-type="string">
            <text:p>Celdas de resultado:</text:p>
          </table:table-cell>
          <table:table-cell table:style-name="ce78"/>
          <table:table-cell table:style-name="ce83" table:number-columns-repeated="3"/>
          <table:table-cell table:number-columns-repeated="16378"/>
        </table:table-row>
        <table:table-row-group>
          <table:table-row table:style-name="ro4">
            <table:table-cell/>
            <table:table-cell table:style-name="ce77"/>
            <table:table-cell table:style-name="ce77" office:value-type="string" calcext:value-type="string">
              <text:p>VANE</text:p>
            </table:table-cell>
            <table:table-cell table:style-name="ce52" office:value-type="float" office:value="12744.6332871755" calcext:value-type="float">
              <text:p>12745</text:p>
            </table:table-cell>
            <table:table-cell table:style-name="ce52" office:value-type="float" office:value="21226.3527293635" calcext:value-type="float">
              <text:p>21226</text:p>
            </table:table-cell>
            <table:table-cell table:style-name="ce52" office:value-type="float" office:value="4262.91384498749" calcext:value-type="float">
              <text:p>4263</text:p>
            </table:table-cell>
            <table:table-cell table:number-columns-repeated="16378"/>
          </table:table-row>
          <table:table-row table:style-name="ro4">
            <table:table-cell/>
            <table:table-cell table:style-name="ce77"/>
            <table:table-cell table:style-name="ce77" office:value-type="string" calcext:value-type="string">
              <text:p>TIRE</text:p>
            </table:table-cell>
            <table:table-cell table:style-name="ce86" office:value-type="percentage" office:value="0.38289336479912" calcext:value-type="percentage">
              <text:p>38.29 %</text:p>
            </table:table-cell>
            <table:table-cell table:style-name="ce86" office:value-type="percentage" office:value="0.511724893217373" calcext:value-type="percentage">
              <text:p>51.17 %</text:p>
            </table:table-cell>
            <table:table-cell table:style-name="ce86" office:value-type="percentage" office:value="0.252902298421762" calcext:value-type="percentage">
              <text:p>25.29 %</text:p>
            </table:table-cell>
            <table:table-cell table:number-columns-repeated="16378"/>
          </table:table-row>
          <table:table-row table:style-name="ro4">
            <table:table-cell/>
            <table:table-cell table:style-name="ce77"/>
            <table:table-cell table:style-name="ce77" office:value-type="string" calcext:value-type="string">
              <text:p>VANF</text:p>
            </table:table-cell>
            <table:table-cell table:style-name="ce52" office:value-type="float" office:value="35.8725338561141" calcext:value-type="float">
              <text:p>36</text:p>
            </table:table-cell>
            <table:table-cell table:style-name="ce52" office:value-type="float" office:value="35.4179396506719" calcext:value-type="float">
              <text:p>35</text:p>
            </table:table-cell>
            <table:table-cell table:style-name="ce52" office:value-type="float" office:value="36.3271280615563" calcext:value-type="float">
              <text:p>36</text:p>
            </table:table-cell>
            <table:table-cell table:number-columns-repeated="16378"/>
          </table:table-row>
          <table:table-row table:style-name="ro7">
            <table:table-cell/>
            <table:table-cell table:style-name="ce79"/>
            <table:table-cell table:style-name="ce79" office:value-type="string" calcext:value-type="string">
              <text:p>TIRF</text:p>
            </table:table-cell>
            <table:table-cell table:style-name="ce87" office:value-type="percentage" office:value="0.383519287594531" calcext:value-type="percentage">
              <text:p>38.35 %</text:p>
            </table:table-cell>
            <table:table-cell table:style-name="ce87" office:value-type="percentage" office:value="0.512407439831674" calcext:value-type="percentage">
              <text:p>51.24 %</text:p>
            </table:table-cell>
            <table:table-cell table:style-name="ce87" office:value-type="percentage" office:value="0.253467010329775" calcext:value-type="percentage">
              <text:p>25.35 %</text:p>
            </table:table-cell>
            <table:table-cell table:number-columns-repeated="16378"/>
          </table:table-row>
        </table:table-row-group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Variables</text:p>
          </table:table-cell>
          <table:table-cell office:value-type="string" calcext:value-type="string">
            <text:p>Probables</text:p>
          </table:table-cell>
          <table:table-cell office:value-type="string" calcext:value-type="string">
            <text:p>Optimista </text:p>
          </table:table-cell>
          <table:table-cell office:value-type="string" calcext:value-type="string">
            <text:p>pesimista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Precio</text:p>
          </table:table-cell>
          <table:table-cell office:value-type="float" office:value="28.5" calcext:value-type="float">
            <text:p>28.5</text:p>
          </table:table-cell>
          <table:table-cell table:style-name="ce88" office:value-type="currency" office:currency="$" office:value="29" calcext:value-type="currency">
            <text:p><text:s/>$29.00 </text:p>
          </table:table-cell>
          <table:table-cell table:style-name="ce88" office:value-type="currency" office:currency="$" office:value="27.5" calcext:value-type="currency">
            <text:p><text:s/>$27.50 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Mano de obra</text:p>
          </table:table-cell>
          <table:table-cell office:value-type="float" office:value="8.33" calcext:value-type="float">
            <text:p>8.33</text:p>
          </table:table-cell>
          <table:table-cell table:style-name="ce88" office:value-type="currency" office:currency="$" office:value="7.9" calcext:value-type="currency">
            <text:p><text:s/>$7.90 </text:p>
          </table:table-cell>
          <table:table-cell table:style-name="ce88" office:value-type="currency" office:currency="$" office:value="10" calcext:value-type="currency">
            <text:p><text:s/>$10.00 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Lana de ovino</text:p>
          </table:table-cell>
          <table:table-cell office:value-type="float" office:value="0.133" calcext:value-type="float">
            <text:p>0.133</text:p>
          </table:table-cell>
          <table:table-cell table:style-name="ce88" office:value-type="currency" office:currency="$" office:value="0.12" calcext:value-type="currency">
            <text:p><text:s/>$0.12 </text:p>
          </table:table-cell>
          <table:table-cell table:style-name="ce90" office:value-type="currency" office:currency="$" office:value="0.2" calcext:value-type="currency">
            <text:p><text:s/>$0.20 </text:p>
          </table:table-cell>
          <table:table-cell table:number-columns-repeated="16379"/>
        </table:table-row>
        <table:table-row table:style-name="ro4" table:number-rows-repeated="980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VANE" table:base-cell-address="$Hoja1.$A$1" table:cell-range-address="$DATOS.$C$14"/>
        </table:named-expressions>
      </table:table>
      <table:table table:name="a) Presupuesto_Ventas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3" table:number-columns-repeated="8" table:default-cell-style-name="Default"/>
        <table:table-column table:style-name="co14" table:number-columns-repeated="16358" table:default-cell-style-name="Default"/>
        <table:table-row table:style-name="ro4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4">
          <table:table-cell/>
          <table:table-cell table:style-name="ce92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103"/>
          <table:table-cell table:number-columns-repeated="16369"/>
        </table:table-row>
        <table:table-row table:style-name="ro9">
          <table:table-cell/>
          <table:table-cell table:style-name="ce93"/>
          <table:table-cell table:style-name="ce104" table:number-columns-repeated="13"/>
          <table:table-cell table:number-columns-repeated="16369"/>
        </table:table-row>
        <table:table-row table:style-name="ro4">
          <table:table-cell/>
          <table:table-cell table:style-name="ce94" office:value-type="string" calcext:value-type="string" table:number-columns-spanned="14" table:number-rows-spanned="1">
            <text:p>Proyeccion de ventas en unidades</text:p>
          </table:table-cell>
          <table:covered-table-cell table:number-columns-repeated="13" table:style-name="ce103"/>
          <table:table-cell table:number-columns-repeated="16369"/>
        </table:table-row>
        <table:table-row table:style-name="ro7">
          <table:table-cell/>
          <table:table-cell table:style-name="ce93"/>
          <table:table-cell table:style-name="ce104" table:number-columns-repeated="13"/>
          <table:table-cell table:number-columns-repeated="16369"/>
        </table:table-row>
        <table:table-row table:style-name="ro10">
          <table:table-cell table:style-name="ce91"/>
          <table:table-cell table:style-name="ce95" office:value-type="string" calcext:value-type="string">
            <text:p>Año</text:p>
          </table:table-cell>
          <table:table-cell table:style-name="ce105" office:value-type="string" calcext:value-type="string">
            <text:p>Mes 1</text:p>
          </table:table-cell>
          <table:table-cell table:style-name="ce105" office:value-type="string" calcext:value-type="string">
            <text:p>Mes 2</text:p>
          </table:table-cell>
          <table:table-cell table:style-name="ce105" office:value-type="string" calcext:value-type="string">
            <text:p>Mes 3</text:p>
          </table:table-cell>
          <table:table-cell table:style-name="ce105" office:value-type="string" calcext:value-type="string">
            <text:p>Mes 4</text:p>
          </table:table-cell>
          <table:table-cell table:style-name="ce105" office:value-type="string" calcext:value-type="string">
            <text:p>Mes 5</text:p>
          </table:table-cell>
          <table:table-cell table:style-name="ce105" office:value-type="string" calcext:value-type="string">
            <text:p>Mes 6</text:p>
          </table:table-cell>
          <table:table-cell table:style-name="ce105" office:value-type="string" calcext:value-type="string">
            <text:p>Mes 7</text:p>
          </table:table-cell>
          <table:table-cell table:style-name="ce105" office:value-type="string" calcext:value-type="string">
            <text:p>Mes 8</text:p>
          </table:table-cell>
          <table:table-cell table:style-name="ce105" office:value-type="string" calcext:value-type="string">
            <text:p>Mes 9</text:p>
          </table:table-cell>
          <table:table-cell table:style-name="ce105" office:value-type="string" calcext:value-type="string">
            <text:p>Mes 10</text:p>
          </table:table-cell>
          <table:table-cell table:style-name="ce105" office:value-type="string" calcext:value-type="string">
            <text:p>Mes 11</text:p>
          </table:table-cell>
          <table:table-cell table:style-name="ce105" office:value-type="string" calcext:value-type="string">
            <text:p>Mes 12</text:p>
          </table:table-cell>
          <table:table-cell table:style-name="ce113" office:value-type="string" calcext:value-type="string">
            <text:p>TOTAL</text:p>
          </table:table-cell>
          <table:table-cell table:style-name="ce91" table:number-columns-repeated="2"/>
          <table:table-cell table:style-name="ce119"/>
          <table:table-cell table:style-name="ce91" table:number-columns-repeated="8"/>
          <table:table-cell table:number-columns-repeated="16358"/>
        </table:table-row>
        <table:table-row table:style-name="ro8">
          <table:table-cell table:style-name="ce91"/>
          <table:table-cell table:style-name="ce96" office:value-type="float" office:value="1" calcext:value-type="float">
            <text:p>1</text:p>
          </table:table-cell>
          <table:table-cell table:style-name="ce106" office:value-type="float" office:value="100" calcext:value-type="float">
            <text:p>100</text:p>
          </table:table-cell>
          <table:table-cell table:number-columns-repeated="2" table:style-name="ce106" office:value-type="float" office:value="95" calcext:value-type="float">
            <text:p>95</text:p>
          </table:table-cell>
          <table:table-cell table:number-columns-repeated="3" table:style-name="ce106" office:value-type="float" office:value="110" calcext:value-type="float">
            <text:p>110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95" calcext:value-type="float">
            <text:p>95</text:p>
          </table:table-cell>
          <table:table-cell table:style-name="ce106" office:value-type="float" office:value="110" calcext:value-type="float">
            <text:p>110</text:p>
          </table:table-cell>
          <table:table-cell table:number-columns-repeated="2" table:style-name="ce106" office:value-type="float" office:value="120" calcext:value-type="float">
            <text:p>120</text:p>
          </table:table-cell>
          <table:table-cell table:style-name="ce106" office:value-type="float" office:value="110" calcext:value-type="float">
            <text:p>110</text:p>
          </table:table-cell>
          <table:table-cell table:style-name="ce114" table:formula="of:=SUM([.C7:.N7])" office:value-type="float" office:value="1275" calcext:value-type="float">
            <text:p>1,275</text:p>
          </table:table-cell>
          <table:table-cell table:style-name="ce91" table:number-columns-repeated="11"/>
          <table:table-cell table:number-columns-repeated="16358"/>
        </table:table-row>
        <table:table-row table:style-name="ro11">
          <table:table-cell table:style-name="ce91"/>
          <table:table-cell table:style-name="ce97" office:value-type="float" office:value="2" calcext:value-type="float">
            <text:p>2</text:p>
          </table:table-cell>
          <table:table-cell table:style-name="ce107" office:value-type="float" office:value="110" calcext:value-type="float">
            <text:p>110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10" calcext:value-type="float">
            <text:p>110</text:p>
          </table:table-cell>
          <table:table-cell table:style-name="ce107" office:value-type="float" office:value="120" calcext:value-type="float">
            <text:p>120</text:p>
          </table:table-cell>
          <table:table-cell table:number-columns-repeated="2" table:style-name="ce107" office:value-type="float" office:value="110" calcext:value-type="float">
            <text:p>110</text:p>
          </table:table-cell>
          <table:table-cell table:number-columns-repeated="4" table:style-name="ce107" office:value-type="float" office:value="120" calcext:value-type="float">
            <text:p>120</text:p>
          </table:table-cell>
          <table:table-cell table:style-name="ce107" office:value-type="float" office:value="130" calcext:value-type="float">
            <text:p>130</text:p>
          </table:table-cell>
          <table:table-cell table:style-name="ce107" office:value-type="float" office:value="140" calcext:value-type="float">
            <text:p>140</text:p>
          </table:table-cell>
          <table:table-cell table:style-name="ce114" table:formula="of:=SUM([.C8:.N8])" office:value-type="float" office:value="1430" calcext:value-type="float">
            <text:p>1,430</text:p>
          </table:table-cell>
          <table:table-cell table:style-name="ce91" table:number-columns-repeated="11"/>
          <table:table-cell table:number-columns-repeated="16358"/>
        </table:table-row>
        <table:table-row table:style-name="ro12">
          <table:table-cell/>
          <table:table-cell table:style-name="ce98" office:value-type="float" office:value="3" calcext:value-type="float">
            <text:p>3</text:p>
          </table:table-cell>
          <table:table-cell table:number-columns-repeated="5" table:style-name="ce108" office:value-type="float" office:value="140" calcext:value-type="float">
            <text:p>140</text:p>
          </table:table-cell>
          <table:table-cell table:number-columns-repeated="6" table:style-name="ce108" office:value-type="float" office:value="150" calcext:value-type="float">
            <text:p>150</text:p>
          </table:table-cell>
          <table:table-cell table:style-name="ce108" office:value-type="float" office:value="170" calcext:value-type="float">
            <text:p>170</text:p>
          </table:table-cell>
          <table:table-cell table:style-name="ce115" table:formula="of:=SUM([.C9:.N9])" office:value-type="float" office:value="1770" calcext:value-type="float">
            <text:p>1,770</text:p>
          </table:table-cell>
          <table:table-cell table:number-columns-repeated="16369"/>
        </table:table-row>
        <table:table-row table:style-name="ro6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13">
          <table:table-cell/>
          <table:table-cell table:style-name="ce92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103"/>
          <table:table-cell table:number-columns-repeated="16368"/>
        </table:table-row>
        <table:table-row table:style-name="ro14">
          <table:table-cell/>
          <table:table-cell table:style-name="ce93"/>
          <table:table-cell table:style-name="ce104" table:number-columns-repeated="13"/>
          <table:table-cell table:style-name="ce93"/>
          <table:table-cell table:number-columns-repeated="16368"/>
        </table:table-row>
        <table:table-row table:style-name="ro4">
          <table:table-cell/>
          <table:table-cell table:style-name="ce92" office:value-type="string" calcext:value-type="string" table:number-columns-spanned="15" table:number-rows-spanned="1">
            <text:p>Proyeccion de ventas en nuevos dólares</text:p>
          </table:table-cell>
          <table:covered-table-cell table:number-columns-repeated="14" table:style-name="ce103"/>
          <table:table-cell table:number-columns-repeated="16368"/>
        </table:table-row>
        <table:table-row table:style-name="ro9">
          <table:table-cell/>
          <table:table-cell table:style-name="ce93"/>
          <table:table-cell table:style-name="ce104" table:number-columns-repeated="13"/>
          <table:table-cell table:style-name="ce93"/>
          <table:table-cell table:number-columns-repeated="16368"/>
        </table:table-row>
        <table:table-row table:style-name="ro15">
          <table:table-cell/>
          <table:table-cell table:style-name="ce99" office:value-type="string" calcext:value-type="string">
            <text:p>Año</text:p>
          </table:table-cell>
          <table:table-cell table:style-name="ce109" office:value-type="string" calcext:value-type="string">
            <text:p>Valor Unitario</text:p>
          </table:table-cell>
          <table:table-cell table:style-name="ce109" office:value-type="string" calcext:value-type="string">
            <text:p>Mes 1</text:p>
          </table:table-cell>
          <table:table-cell table:style-name="ce109" office:value-type="string" calcext:value-type="string">
            <text:p>Mes 2</text:p>
          </table:table-cell>
          <table:table-cell table:style-name="ce109" office:value-type="string" calcext:value-type="string">
            <text:p>Mes 3</text:p>
          </table:table-cell>
          <table:table-cell table:style-name="ce109" office:value-type="string" calcext:value-type="string">
            <text:p>Mes 4</text:p>
          </table:table-cell>
          <table:table-cell table:style-name="ce109" office:value-type="string" calcext:value-type="string">
            <text:p>Mes 5</text:p>
          </table:table-cell>
          <table:table-cell table:style-name="ce109" office:value-type="string" calcext:value-type="string">
            <text:p>Mes 6</text:p>
          </table:table-cell>
          <table:table-cell table:style-name="ce109" office:value-type="string" calcext:value-type="string">
            <text:p>Mes 7</text:p>
          </table:table-cell>
          <table:table-cell table:style-name="ce109" office:value-type="string" calcext:value-type="string">
            <text:p>Mes 8</text:p>
          </table:table-cell>
          <table:table-cell table:style-name="ce109" office:value-type="string" calcext:value-type="string">
            <text:p>Mes 9</text:p>
          </table:table-cell>
          <table:table-cell table:style-name="ce109" office:value-type="string" calcext:value-type="string">
            <text:p>Mes 10</text:p>
          </table:table-cell>
          <table:table-cell table:style-name="ce109" office:value-type="string" calcext:value-type="string">
            <text:p>Mes 11</text:p>
          </table:table-cell>
          <table:table-cell table:style-name="ce109" office:value-type="string" calcext:value-type="string">
            <text:p>Mes 12</text:p>
          </table:table-cell>
          <table:table-cell table:style-name="ce116" office:value-type="string" calcext:value-type="string">
            <text:p>TOTAL</text:p>
          </table:table-cell>
          <table:table-cell table:number-columns-repeated="16368"/>
        </table:table-row>
        <table:table-row table:style-name="ro4">
          <table:table-cell/>
          <table:table-cell table:style-name="ce100" office:value-type="float" office:value="1" calcext:value-type="float">
            <text:p>1</text:p>
          </table:table-cell>
          <table:table-cell table:style-name="ce110" table:formula="of:=Valor_del_cojin" office:value-type="float" office:value="28.5" calcext:value-type="float">
            <text:p>28.5</text:p>
          </table:table-cell>
          <table:table-cell table:style-name="ce111" table:formula="of:=[.C7]*[.C16]" office:value-type="float" office:value="2850" calcext:value-type="float">
            <text:p>2850</text:p>
          </table:table-cell>
          <table:table-cell table:style-name="ce111" table:formula="of:=[.D7]*[.C16]" office:value-type="float" office:value="2707.5" calcext:value-type="float">
            <text:p>2708</text:p>
          </table:table-cell>
          <table:table-cell table:style-name="ce111" table:formula="of:=[.E7]*[.C16]" office:value-type="float" office:value="2707.5" calcext:value-type="float">
            <text:p>2708</text:p>
          </table:table-cell>
          <table:table-cell table:style-name="ce111" table:formula="of:=[.F7]*[.C16]" office:value-type="float" office:value="3135" calcext:value-type="float">
            <text:p>3135</text:p>
          </table:table-cell>
          <table:table-cell table:style-name="ce111" table:formula="of:=[.G7]*[.C16]" office:value-type="float" office:value="3135" calcext:value-type="float">
            <text:p>3135</text:p>
          </table:table-cell>
          <table:table-cell table:style-name="ce111" table:formula="of:=[.H7]*[.C16]" office:value-type="float" office:value="3135" calcext:value-type="float">
            <text:p>3135</text:p>
          </table:table-cell>
          <table:table-cell table:style-name="ce111" table:formula="of:=[.I7]*[.C16]" office:value-type="float" office:value="2850" calcext:value-type="float">
            <text:p>2850</text:p>
          </table:table-cell>
          <table:table-cell table:style-name="ce111" table:formula="of:=[.J7]*[.C16]" office:value-type="float" office:value="2707.5" calcext:value-type="float">
            <text:p>2708</text:p>
          </table:table-cell>
          <table:table-cell table:style-name="ce111" table:formula="of:=[.K7]*[.C16]" office:value-type="float" office:value="3135" calcext:value-type="float">
            <text:p>3135</text:p>
          </table:table-cell>
          <table:table-cell table:style-name="ce111" table:formula="of:=[.L7]*[.C16]" office:value-type="float" office:value="3420" calcext:value-type="float">
            <text:p>3420</text:p>
          </table:table-cell>
          <table:table-cell table:style-name="ce111" table:formula="of:=[.M7]*[.C16]" office:value-type="float" office:value="3420" calcext:value-type="float">
            <text:p>3420</text:p>
          </table:table-cell>
          <table:table-cell table:style-name="ce111" table:formula="of:=[.N7]*[.C16]" office:value-type="float" office:value="3135" calcext:value-type="float">
            <text:p>3135</text:p>
          </table:table-cell>
          <table:table-cell table:style-name="ce117" table:formula="of:=SUM([.D16:.O16])" office:value-type="float" office:value="36337.5" calcext:value-type="float">
            <text:p>36338</text:p>
          </table:table-cell>
          <table:table-cell table:number-columns-repeated="16368"/>
        </table:table-row>
        <table:table-row table:style-name="ro4">
          <table:table-cell/>
          <table:table-cell table:style-name="ce100" office:value-type="float" office:value="2" calcext:value-type="float">
            <text:p>2</text:p>
          </table:table-cell>
          <table:table-cell table:style-name="ce110" table:formula="of:=Valor_del_cojin" office:value-type="float" office:value="28.5" calcext:value-type="float">
            <text:p>28.5</text:p>
          </table:table-cell>
          <table:table-cell table:style-name="ce111" table:formula="of:=[.C8]*[.C17]" office:value-type="float" office:value="3135" calcext:value-type="float">
            <text:p>3135</text:p>
          </table:table-cell>
          <table:table-cell table:style-name="ce111" table:formula="of:=[.D8]*[.C17]" office:value-type="float" office:value="3420" calcext:value-type="float">
            <text:p>3420</text:p>
          </table:table-cell>
          <table:table-cell table:style-name="ce111" table:formula="of:=[.E8]*[.C17]" office:value-type="float" office:value="3135" calcext:value-type="float">
            <text:p>3135</text:p>
          </table:table-cell>
          <table:table-cell table:style-name="ce111" table:formula="of:=[.F8]*[.C17]" office:value-type="float" office:value="3420" calcext:value-type="float">
            <text:p>3420</text:p>
          </table:table-cell>
          <table:table-cell table:style-name="ce111" table:formula="of:=[.G8]*[.C17]" office:value-type="float" office:value="3135" calcext:value-type="float">
            <text:p>3135</text:p>
          </table:table-cell>
          <table:table-cell table:style-name="ce111" table:formula="of:=[.H8]*[.C17]" office:value-type="float" office:value="3135" calcext:value-type="float">
            <text:p>3135</text:p>
          </table:table-cell>
          <table:table-cell table:style-name="ce111" table:formula="of:=[.I8]*[.C17]" office:value-type="float" office:value="3420" calcext:value-type="float">
            <text:p>3420</text:p>
          </table:table-cell>
          <table:table-cell table:style-name="ce111" table:formula="of:=[.J8]*[.C17]" office:value-type="float" office:value="3420" calcext:value-type="float">
            <text:p>3420</text:p>
          </table:table-cell>
          <table:table-cell table:style-name="ce111" table:formula="of:=[.K8]*[.C17]" office:value-type="float" office:value="3420" calcext:value-type="float">
            <text:p>3420</text:p>
          </table:table-cell>
          <table:table-cell table:style-name="ce111" table:formula="of:=[.L8]*[.C17]" office:value-type="float" office:value="3420" calcext:value-type="float">
            <text:p>3420</text:p>
          </table:table-cell>
          <table:table-cell table:style-name="ce111" table:formula="of:=[.M8]*[.C17]" office:value-type="float" office:value="3705" calcext:value-type="float">
            <text:p>3705</text:p>
          </table:table-cell>
          <table:table-cell table:style-name="ce111" table:formula="of:=[.N8]*[.C17]" office:value-type="float" office:value="3990" calcext:value-type="float">
            <text:p>3990</text:p>
          </table:table-cell>
          <table:table-cell table:style-name="ce117" table:formula="of:=SUM([.D17:.O17])" office:value-type="float" office:value="40755" calcext:value-type="float">
            <text:p>40755</text:p>
          </table:table-cell>
          <table:table-cell table:number-columns-repeated="16368"/>
        </table:table-row>
        <table:table-row table:style-name="ro4">
          <table:table-cell/>
          <table:table-cell table:style-name="ce101" office:value-type="float" office:value="3" calcext:value-type="float">
            <text:p>3</text:p>
          </table:table-cell>
          <table:table-cell table:style-name="ce110" table:formula="of:=Valor_del_cojin" office:value-type="float" office:value="28.5" calcext:value-type="float">
            <text:p>28.5</text:p>
          </table:table-cell>
          <table:table-cell table:style-name="ce112" table:formula="of:=[.C9]*[.C18]" office:value-type="float" office:value="3990" calcext:value-type="float">
            <text:p>3990</text:p>
          </table:table-cell>
          <table:table-cell table:style-name="ce112" table:formula="of:=[.D9]*[.C18]" office:value-type="float" office:value="3990" calcext:value-type="float">
            <text:p>3990</text:p>
          </table:table-cell>
          <table:table-cell table:style-name="ce112" table:formula="of:=[.E9]*[.C18]" office:value-type="float" office:value="3990" calcext:value-type="float">
            <text:p>3990</text:p>
          </table:table-cell>
          <table:table-cell table:style-name="ce112" table:formula="of:=[.F9]*[.C18]" office:value-type="float" office:value="3990" calcext:value-type="float">
            <text:p>3990</text:p>
          </table:table-cell>
          <table:table-cell table:style-name="ce112" table:formula="of:=[.G9]*[.C18]" office:value-type="float" office:value="3990" calcext:value-type="float">
            <text:p>3990</text:p>
          </table:table-cell>
          <table:table-cell table:style-name="ce112" table:formula="of:=[.H9]*[.C18]" office:value-type="float" office:value="4275" calcext:value-type="float">
            <text:p>4275</text:p>
          </table:table-cell>
          <table:table-cell table:style-name="ce112" table:formula="of:=[.I9]*[.C18]" office:value-type="float" office:value="4275" calcext:value-type="float">
            <text:p>4275</text:p>
          </table:table-cell>
          <table:table-cell table:style-name="ce112" table:formula="of:=[.J9]*[.C18]" office:value-type="float" office:value="4275" calcext:value-type="float">
            <text:p>4275</text:p>
          </table:table-cell>
          <table:table-cell table:style-name="ce112" table:formula="of:=[.K9]*[.C18]" office:value-type="float" office:value="4275" calcext:value-type="float">
            <text:p>4275</text:p>
          </table:table-cell>
          <table:table-cell table:style-name="ce112" table:formula="of:=[.L9]*[.C18]" office:value-type="float" office:value="4275" calcext:value-type="float">
            <text:p>4275</text:p>
          </table:table-cell>
          <table:table-cell table:style-name="ce112" table:formula="of:=[.M9]*[.C18]" office:value-type="float" office:value="4275" calcext:value-type="float">
            <text:p>4275</text:p>
          </table:table-cell>
          <table:table-cell table:style-name="ce112" table:formula="of:=[.N9]*[.C18]" office:value-type="float" office:value="4845" calcext:value-type="float">
            <text:p>4845</text:p>
          </table:table-cell>
          <table:table-cell table:style-name="ce118" table:formula="of:=SUM([.D18:.O18])" office:value-type="float" office:value="50445" calcext:value-type="float">
            <text:p>50445</text:p>
          </table:table-cell>
          <table:table-cell table:number-columns-repeated="16368"/>
        </table:table-row>
        <table:table-row table:style-name="ro4" table:number-rows-repeated="978">
          <table:table-cell table:number-columns-repeated="2"/>
          <table:table-cell table:style-name="ce102" table:number-columns-repeated="13"/>
          <table:table-cell table:number-columns-repeated="16369"/>
        </table:table-row>
        <table:table-row table:style-name="ro8" table:number-rows-repeated="104757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b) Inversión Inicial" table:style-name="ta8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number-columns-repeated="16" table:default-cell-style-name="Default"/>
        <table:table-column table:style-name="co14" table:number-columns-repeated="16360" table:default-cell-style-name="Default"/>
        <table:table-row table:style-name="ro4">
          <table:table-cell table:style-name="ce120" table:number-columns-repeated="24"/>
          <table:table-cell table:number-columns-repeated="16360"/>
        </table:table-row>
        <table:table-row table:style-name="ro4">
          <table:table-cell table:style-name="ce120"/>
          <table:table-cell table:style-name="ce121" office:value-type="string" calcext:value-type="string" table:number-columns-spanned="5" table:number-rows-spanned="1">
            <text:p>CUADRO N°03</text:p>
          </table:table-cell>
          <table:covered-table-cell table:number-columns-repeated="4" table:style-name="ce103"/>
          <table:table-cell table:style-name="ce121"/>
          <table:table-cell table:style-name="ce120" table:number-columns-repeated="17"/>
          <table:table-cell table:number-columns-repeated="16360"/>
        </table:table-row>
        <table:table-row table:style-name="ro4">
          <table:table-cell table:style-name="ce120"/>
          <table:table-cell table:style-name="ce122" office:value-type="string" calcext:value-type="string" table:number-columns-spanned="5" table:number-rows-spanned="1">
            <text:p>PRESUPUESTO DE INVERSIÓN INICIAL</text:p>
          </table:table-cell>
          <table:covered-table-cell table:number-columns-repeated="4" table:style-name="ce103"/>
          <table:table-cell table:style-name="ce122"/>
          <table:table-cell table:style-name="ce120" table:number-columns-repeated="17"/>
          <table:table-cell table:number-columns-repeated="16360"/>
        </table:table-row>
        <table:table-row table:style-name="ro7">
          <table:table-cell table:style-name="ce120" table:number-columns-repeated="24"/>
          <table:table-cell table:number-columns-repeated="16360"/>
        </table:table-row>
        <table:table-row table:style-name="ro7">
          <table:table-cell table:style-name="ce120"/>
          <table:table-cell table:style-name="ce123" office:value-type="string" calcext:value-type="string" table:number-columns-spanned="1" table:number-rows-spanned="2">
            <text:p>RUBRO</text:p>
          </table:table-cell>
          <table:table-cell table:style-name="ce133" office:value-type="string" calcext:value-type="string" table:number-columns-spanned="4" table:number-rows-spanned="1">
            <text:p>INVERSIÓN INICIAL</text:p>
          </table:table-cell>
          <table:covered-table-cell table:number-columns-repeated="2" table:style-name="ce142"/>
          <table:covered-table-cell table:style-name="ce151"/>
          <table:table-cell/>
          <table:table-cell table:style-name="ce120" table:number-columns-repeated="17"/>
          <table:table-cell table:number-columns-repeated="16360"/>
        </table:table-row>
        <table:table-row table:style-name="ro16">
          <table:table-cell table:style-name="ce120"/>
          <table:covered-table-cell table:style-name="ce124"/>
          <table:table-cell table:style-name="ce134" office:value-type="string" calcext:value-type="string">
            <text:p>Unidad de Medida</text:p>
          </table:table-cell>
          <table:table-cell table:style-name="ce134" office:value-type="string" calcext:value-type="string">
            <text:p>Unidad Requerida</text:p>
          </table:table-cell>
          <table:table-cell table:style-name="ce134" office:value-type="string" calcext:value-type="string">
            <text:p>Valor Unitario</text:p>
          </table:table-cell>
          <table:table-cell table:style-name="ce152" office:value-type="string" calcext:value-type="string">
            <text:p>Total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5" office:value-type="string" calcext:value-type="string">
            <text:p>ACTIVO FIJO</text:p>
          </table:table-cell>
          <table:table-cell table:style-name="ce135" table:number-columns-repeated="3"/>
          <table:table-cell table:style-name="ce153"/>
          <table:table-cell table:style-name="ce120"/>
          <table:table-cell table:style-name="ce164" office:value-type="string" calcext:value-type="string">
            <text:p>tipo de cambio </text:p>
          </table:table-cell>
          <table:table-cell table:style-name="ce166" table:formula="of:=[$DATOS.H8]" office:value-type="float" office:value="3.7" calcext:value-type="float">
            <text:p><text:s/>3.70 </text:p>
          </table:table-cell>
          <table:table-cell table:style-name="ce120" table:number-columns-repeated="15"/>
          <table:table-cell table:number-columns-repeated="16360"/>
        </table:table-row>
        <table:table-row table:style-name="ro4">
          <table:table-cell table:style-name="ce120"/>
          <table:table-cell table:style-name="ce126" office:value-type="string" calcext:value-type="string">
            <text:p>A. TANGIBLES</text:p>
          </table:table-cell>
          <table:table-cell table:style-name="ce136" table:number-columns-repeated="3"/>
          <table:table-cell table:style-name="ce154" table:formula="of:=SUM([.F9:.F16])" office:value-type="float" office:value="3864.86486486486" calcext:value-type="float">
            <text:p>3,865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Laptop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3" calcext:value-type="float">
            <text:p>3</text:p>
          </table:table-cell>
          <table:table-cell table:style-name="ce146" table:formula="of:=1800/[.I7]" office:value-type="float" office:value="486.486486486486" calcext:value-type="float">
            <text:p>486</text:p>
          </table:table-cell>
          <table:table-cell table:style-name="ce155" table:formula="of:=[.D9]*[.E9]" office:value-type="float" office:value="1459.45945945946" calcext:value-type="float">
            <text:p>1,459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Impresora mutifuncional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1" calcext:value-type="float">
            <text:p>1</text:p>
          </table:table-cell>
          <table:table-cell table:style-name="ce146" table:formula="of:=200/[.I7]" office:value-type="float" office:value="54.0540540540541" calcext:value-type="float">
            <text:p>54</text:p>
          </table:table-cell>
          <table:table-cell table:style-name="ce155" table:formula="of:=[.D10]*[.E10]" office:value-type="float" office:value="54.0540540540541" calcext:value-type="float">
            <text:p>54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8" office:value-type="string" calcext:value-type="string">
            <text:p>mobiliario de oficina (escritorio, sillas estantes)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1" calcext:value-type="float">
            <text:p>1</text:p>
          </table:table-cell>
          <table:table-cell table:style-name="ce146" table:formula="of:=2000/[.I7]" office:value-type="float" office:value="540.540540540541" calcext:value-type="float">
            <text:p>541</text:p>
          </table:table-cell>
          <table:table-cell table:style-name="ce155" table:formula="of:=[.D11]*[.E11]" office:value-type="float" office:value="540.540540540541" calcext:value-type="float">
            <text:p>541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mesa de trabajo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3" calcext:value-type="float">
            <text:p>3</text:p>
          </table:table-cell>
          <table:table-cell table:style-name="ce146" table:formula="of:=200/[.I7]" office:value-type="float" office:value="54.0540540540541" calcext:value-type="float">
            <text:p>54</text:p>
          </table:table-cell>
          <table:table-cell table:style-name="ce155" table:formula="of:=[.D12]*[.E12]" office:value-type="float" office:value="162.162162162162" calcext:value-type="float">
            <text:p>162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máquina de telares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2" calcext:value-type="float">
            <text:p>2</text:p>
          </table:table-cell>
          <table:table-cell table:style-name="ce146" table:formula="of:=400/[.I7]" office:value-type="float" office:value="108.108108108108" calcext:value-type="float">
            <text:p>108</text:p>
          </table:table-cell>
          <table:table-cell table:style-name="ce155" table:formula="of:=[.D13]*[.E13]" office:value-type="float" office:value="216.216216216216" calcext:value-type="float">
            <text:p>216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máquina de coser electricas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3" calcext:value-type="float">
            <text:p>3</text:p>
          </table:table-cell>
          <table:table-cell table:style-name="ce146" table:formula="of:=800/[.I7]" office:value-type="float" office:value="216.216216216216" calcext:value-type="float">
            <text:p>216</text:p>
          </table:table-cell>
          <table:table-cell table:style-name="ce155" table:formula="of:=[.D14]*[.E14]" office:value-type="float" office:value="648.648648648649" calcext:value-type="float">
            <text:p>649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plancha vaporizadora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3" calcext:value-type="float">
            <text:p>3</text:p>
          </table:table-cell>
          <table:table-cell table:style-name="ce146" table:formula="of:=800/[.I7]" office:value-type="float" office:value="216.216216216216" calcext:value-type="float">
            <text:p>216</text:p>
          </table:table-cell>
          <table:table-cell table:style-name="ce155" table:formula="of:=[.D15]*[.E15]" office:value-type="float" office:value="648.648648648649" calcext:value-type="float">
            <text:p>649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enmadejadora electrica</text:p>
          </table:table-cell>
          <table:table-cell table:style-name="ce137" office:value-type="string" calcext:value-type="string">
            <text:p>unidad</text:p>
          </table:table-cell>
          <table:table-cell table:style-name="ce143" office:value-type="float" office:value="1" calcext:value-type="float">
            <text:p>1</text:p>
          </table:table-cell>
          <table:table-cell table:style-name="ce146" table:formula="of:=500/[.I7]" office:value-type="float" office:value="135.135135135135" calcext:value-type="float">
            <text:p>135</text:p>
          </table:table-cell>
          <table:table-cell table:style-name="ce155" table:formula="of:=[.D16]*[.E16]" office:value-type="float" office:value="135.135135135135" calcext:value-type="float">
            <text:p>135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6" office:value-type="string" calcext:value-type="string">
            <text:p>B. INTANGIBLES</text:p>
          </table:table-cell>
          <table:table-cell table:style-name="ce136"/>
          <table:table-cell table:style-name="ce144"/>
          <table:table-cell table:style-name="ce147"/>
          <table:table-cell table:style-name="ce154" table:formula="of:=[.F18]+[.F19]" office:value-type="float" office:value="121.621621621622" calcext:value-type="float">
            <text:p>122</text:p>
          </table:table-cell>
          <table:table-cell table:style-name="ce162"/>
          <table:table-cell table:style-name="ce120" table:number-columns-repeated="17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diseño de pagina web</text:p>
          </table:table-cell>
          <table:table-cell table:style-name="ce137" office:value-type="string" calcext:value-type="string">
            <text:p>plataforma virtual</text:p>
          </table:table-cell>
          <table:table-cell table:style-name="ce143" office:value-type="float" office:value="1" calcext:value-type="float">
            <text:p>1</text:p>
          </table:table-cell>
          <table:table-cell table:style-name="ce146" table:formula="of:=220/[.I7]" office:value-type="float" office:value="59.4594594594595" calcext:value-type="float">
            <text:p>59</text:p>
          </table:table-cell>
          <table:table-cell table:style-name="ce155" table:formula="of:=[.D18]*[.E18]" office:value-type="float" office:value="59.4594594594595" calcext:value-type="float">
            <text:p>59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7" office:value-type="string" calcext:value-type="string">
            <text:p>diseño de marca </text:p>
          </table:table-cell>
          <table:table-cell table:style-name="ce137" office:value-type="string" calcext:value-type="string">
            <text:p>documento</text:p>
          </table:table-cell>
          <table:table-cell table:style-name="ce143" office:value-type="float" office:value="1" calcext:value-type="float">
            <text:p>1</text:p>
          </table:table-cell>
          <table:table-cell table:style-name="ce146" table:formula="of:=230/[.I7]" office:value-type="float" office:value="62.1621621621622" calcext:value-type="float">
            <text:p>62</text:p>
          </table:table-cell>
          <table:table-cell table:style-name="ce155" table:formula="of:=[.D19]*[.E19]" office:value-type="float" office:value="62.1621621621622" calcext:value-type="float">
            <text:p>62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29" office:value-type="string" calcext:value-type="string">
            <text:p>TOTAL DE ACTIVO FIJO</text:p>
          </table:table-cell>
          <table:table-cell table:style-name="ce138" table:number-columns-repeated="2"/>
          <table:table-cell table:style-name="ce148"/>
          <table:table-cell table:style-name="ce156" table:formula="of:=[.F8]+[.F17]" office:value-type="float" office:value="3986.48648648649" calcext:value-type="float">
            <text:p>3,986</text:p>
          </table:table-cell>
          <table:table-cell table:style-name="ce120"/>
          <table:table-cell table:style-name="ce165" table:number-columns-repeated="6"/>
          <table:table-cell table:style-name="ce120" table:number-columns-repeated="11"/>
          <table:table-cell table:number-columns-repeated="16360"/>
        </table:table-row>
        <table:table-row table:style-name="ro4">
          <table:table-cell table:style-name="ce120"/>
          <table:table-cell table:style-name="ce126" office:value-type="string" calcext:value-type="string">
            <text:p>C. CAPITAL DE TRABAJO (1 año)</text:p>
          </table:table-cell>
          <table:table-cell table:style-name="ce136" table:number-columns-repeated="2"/>
          <table:table-cell table:style-name="ce147"/>
          <table:table-cell table:style-name="ce157"/>
          <table:table-cell table:style-name="ce120"/>
          <table:table-cell table:style-name="ce165"/>
          <table:table-cell table:style-name="ce167" table:number-columns-repeated="5"/>
          <table:table-cell table:style-name="ce120" table:number-columns-repeated="11"/>
          <table:table-cell table:number-columns-repeated="16360"/>
        </table:table-row>
        <table:table-row table:style-name="ro4">
          <table:table-cell table:style-name="ce120"/>
          <table:table-cell table:style-name="ce130" office:value-type="string" calcext:value-type="string">
            <text:p>Costos y gastos operativos</text:p>
          </table:table-cell>
          <table:table-cell table:style-name="ce139" office:value-type="string" calcext:value-type="string">
            <text:p>global</text:p>
          </table:table-cell>
          <table:table-cell table:style-name="ce145" office:value-type="float" office:value="1" calcext:value-type="float">
            <text:p>1</text:p>
          </table:table-cell>
          <table:table-cell table:style-name="ce149" table:formula="of:=[$'h) Capital_Trabajo'.P12]" office:value-type="float" office:value="1770.835" calcext:value-type="float">
            <text:p>1771</text:p>
          </table:table-cell>
          <table:table-cell table:style-name="ce158" table:formula="of:=[.D22]*[.E22]" office:value-type="float" office:value="1770.835" calcext:value-type="float">
            <text:p>1,771</text:p>
          </table:table-cell>
          <table:table-cell table:style-name="ce120" table:number-columns-repeated="2"/>
          <table:table-cell table:style-name="ce161" table:number-columns-repeated="5"/>
          <table:table-cell table:style-name="ce120" table:number-columns-repeated="11"/>
          <table:table-cell table:number-columns-repeated="16360"/>
        </table:table-row>
        <table:table-row table:style-name="ro4">
          <table:table-cell table:style-name="ce120"/>
          <table:table-cell table:style-name="ce131" office:value-type="string" calcext:value-type="string">
            <text:p>TOTAL DE CAPITAL DE TRABAJO</text:p>
          </table:table-cell>
          <table:table-cell table:style-name="ce140" table:number-columns-repeated="2"/>
          <table:table-cell table:style-name="ce150"/>
          <table:table-cell table:style-name="ce159" table:formula="of:=[.F22]" office:value-type="float" office:value="1770.835" calcext:value-type="float">
            <text:p>1771</text:p>
          </table:table-cell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/>
          <table:table-cell table:style-name="ce132" office:value-type="string" calcext:value-type="string">
            <text:p>TOTAL DE INVERSIÓN</text:p>
          </table:table-cell>
          <table:table-cell table:style-name="ce141" table:number-columns-repeated="3"/>
          <table:table-cell table:style-name="ce160" table:formula="of:=[.F20]+[.F22]" office:value-type="float" office:value="5757.32148648649" calcext:value-type="float">
            <text:p>5757</text:p>
          </table:table-cell>
          <table:table-cell table:style-name="ce163"/>
          <table:table-cell table:style-name="ce120" table:number-columns-repeated="17"/>
          <table:table-cell table:number-columns-repeated="16360"/>
        </table:table-row>
        <table:table-row table:style-name="ro4">
          <table:table-cell table:style-name="ce120" table:number-columns-repeated="24"/>
          <table:table-cell table:number-columns-repeated="16360"/>
        </table:table-row>
        <table:table-row table:style-name="ro4">
          <table:table-cell table:style-name="ce120" table:number-columns-repeated="5"/>
          <table:table-cell table:style-name="ce161"/>
          <table:table-cell table:style-name="ce120" table:number-columns-repeated="18"/>
          <table:table-cell table:number-columns-repeated="16360"/>
        </table:table-row>
        <table:table-row table:style-name="ro4">
          <table:table-cell table:style-name="ce120" table:number-columns-repeated="24"/>
          <table:table-cell table:number-columns-repeated="16360"/>
        </table:table-row>
        <table:table-row table:style-name="ro4" table:number-rows-repeated="930">
          <table:table-cell table:style-name="ce120" table:number-columns-repeated="24"/>
          <table:table-cell table:number-columns-repeated="16360"/>
        </table:table-row>
        <table:table-row table:style-name="ro8" table:number-rows-repeated="104761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) Dep. y VR" table:style-name="ta9"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15" table:default-cell-style-name="Default"/>
        <table:table-column table:style-name="co14" table:number-columns-repeated="16361" table:default-cell-style-name="Default"/>
        <table:table-row table:style-name="ro4">
          <table:table-cell table:number-columns-repeated="16384"/>
        </table:table-row>
        <table:table-row table:style-name="ro4">
          <table:table-cell/>
          <table:table-cell table:style-name="ce92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103"/>
          <table:table-cell table:number-columns-repeated="16376"/>
        </table:table-row>
        <table:table-row table:style-name="ro5">
          <table:table-cell/>
          <table:table-cell table:style-name="ce169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179"/>
          <table:table-cell table:number-columns-repeated="16376"/>
        </table:table-row>
        <table:table-row table:style-name="ro17">
          <table:table-cell table:style-name="ce168"/>
          <table:table-cell table:style-name="ce170" office:value-type="string" calcext:value-type="string">
            <text:p>A) ACTIVO FIJO</text:p>
          </table:table-cell>
          <table:table-cell table:style-name="ce180" office:value-type="string" calcext:value-type="string">
            <text:p>Valor de compra</text:p>
          </table:table-cell>
          <table:table-cell table:style-name="ce180" office:value-type="string" calcext:value-type="string">
            <text:p>Vida útil (años)</text:p>
          </table:table-cell>
          <table:table-cell table:style-name="ce180" office:value-type="string" calcext:value-type="string">
            <text:p>Tasa de Depreciacion</text:p>
          </table:table-cell>
          <table:table-cell table:style-name="ce180" office:value-type="string" calcext:value-type="string">
            <text:p>Depreciación anual</text:p>
          </table:table-cell>
          <table:table-cell table:style-name="ce180" office:value-type="string" calcext:value-type="string">
            <text:p>Depreciación Acumulada</text:p>
          </table:table-cell>
          <table:table-cell table:style-name="ce201" office:value-type="string" calcext:value-type="string">
            <text:p>Valor de Recupero</text:p>
          </table:table-cell>
          <table:table-cell table:style-name="ce168" table:number-columns-repeated="15"/>
          <table:table-cell table:number-columns-repeated="16361"/>
        </table:table-row>
        <table:table-row table:style-name="ro7">
          <table:table-cell/>
          <table:table-cell table:style-name="ce171" office:value-type="string" calcext:value-type="string">
            <text:p>Maquinaria y equipos</text:p>
          </table:table-cell>
          <table:table-cell table:style-name="ce181" table:formula="of:=SUM([$'b) Inversión Inicial'.F13:.F16])" office:value-type="float" office:value="1648.64864864865" calcext:value-type="float">
            <text:p>1649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1/[.D5]" office:value-type="float" office:value="0.2" calcext:value-type="float">
            <text:p>0.2</text:p>
          </table:table-cell>
          <table:table-cell table:style-name="ce193" table:formula="of:=[.C5]*[.E5]" office:value-type="float" office:value="329.72972972973" calcext:value-type="float">
            <text:p>329.73</text:p>
          </table:table-cell>
          <table:table-cell table:style-name="ce197" table:formula="of:=[.F5]*[$DATOS.$H$11]" office:value-type="float" office:value="989.189189189189" calcext:value-type="float">
            <text:p>989</text:p>
          </table:table-cell>
          <table:table-cell table:style-name="ce202" table:formula="of:=[.C5]-[.G5]" office:value-type="float" office:value="659.459459459459" calcext:value-type="float">
            <text:p>659.46</text:p>
          </table:table-cell>
          <table:table-cell/>
          <table:table-cell table:style-name="ce204"/>
          <table:table-cell table:number-columns-repeated="16374"/>
        </table:table-row>
        <table:table-row table:style-name="ro7">
          <table:table-cell/>
          <table:table-cell table:style-name="ce171" office:value-type="string" calcext:value-type="string">
            <text:p>Equipos informaticos</text:p>
          </table:table-cell>
          <table:table-cell table:style-name="ce181" table:formula="of:=[$'b) Inversión Inicial'.F9]+[$'b) Inversión Inicial'.F10]" office:value-type="float" office:value="1513.51351351351" calcext:value-type="float">
            <text:p>1514</text:p>
          </table:table-cell>
          <table:table-cell table:style-name="ce186" office:value-type="float" office:value="3" calcext:value-type="float">
            <text:p>3</text:p>
          </table:table-cell>
          <table:table-cell table:style-name="ce191" table:formula="of:=1/[.D6]" office:value-type="float" office:value="0.333333333333333" calcext:value-type="float">
            <text:p>0.33</text:p>
          </table:table-cell>
          <table:table-cell table:style-name="ce193" table:formula="of:=[.C6]*[.E6]" office:value-type="float" office:value="504.504504504504" calcext:value-type="float">
            <text:p>504.50</text:p>
          </table:table-cell>
          <table:table-cell table:style-name="ce197" table:formula="of:=[.F6]*[$DATOS.$H$11]" office:value-type="float" office:value="1513.51351351351" calcext:value-type="float">
            <text:p>1514</text:p>
          </table:table-cell>
          <table:table-cell table:style-name="ce202" table:formula="of:=[.C6]-[.G6]" office:value-type="float" office:value="0" calcext:value-type="float">
            <text:p>0.00</text:p>
          </table:table-cell>
          <table:table-cell table:number-columns-repeated="16376"/>
        </table:table-row>
        <table:table-row table:style-name="ro4">
          <table:table-cell/>
          <table:table-cell table:style-name="ce171" office:value-type="string" calcext:value-type="string">
            <text:p>Muebles y enseres</text:p>
          </table:table-cell>
          <table:table-cell table:style-name="ce181" table:formula="of:=[$'b) Inversión Inicial'.F11]+[$'b) Inversión Inicial'.F12]" office:value-type="float" office:value="702.702702702703" calcext:value-type="float">
            <text:p>703</text:p>
          </table:table-cell>
          <table:table-cell table:style-name="ce186" office:value-type="float" office:value="3" calcext:value-type="float">
            <text:p>3</text:p>
          </table:table-cell>
          <table:table-cell table:style-name="ce191" table:formula="of:=1/[.D7]" office:value-type="float" office:value="0.333333333333333" calcext:value-type="float">
            <text:p>0.33</text:p>
          </table:table-cell>
          <table:table-cell table:style-name="ce193" table:formula="of:=[.C7]*[.E7]" office:value-type="float" office:value="234.234234234234" calcext:value-type="float">
            <text:p>234.23</text:p>
          </table:table-cell>
          <table:table-cell table:style-name="ce197" table:formula="of:=[.F7]*[$DATOS.$H$11]" office:value-type="float" office:value="702.702702702703" calcext:value-type="float">
            <text:p>703</text:p>
          </table:table-cell>
          <table:table-cell table:style-name="ce202" table:formula="of:=[.C7]-[.G7]" office:value-type="float" office:value="0" calcext:value-type="float">
            <text:p>0.00</text:p>
          </table:table-cell>
          <table:table-cell table:number-columns-repeated="16376"/>
        </table:table-row>
        <table:table-row table:style-name="ro7">
          <table:table-cell/>
          <table:table-cell table:style-name="ce172" office:value-type="string" calcext:value-type="string">
            <text:p>Total</text:p>
          </table:table-cell>
          <table:table-cell table:style-name="ce182" table:formula="of:=SUM([.C5:.C7])" office:value-type="float" office:value="3864.86486486486" calcext:value-type="float">
            <text:p>3865</text:p>
          </table:table-cell>
          <table:table-cell table:style-name="ce187" table:number-columns-repeated="2"/>
          <table:table-cell table:style-name="ce194" table:formula="of:=SUM([.F5:.F7])" office:value-type="float" office:value="1068.46846846847" calcext:value-type="float">
            <text:p>1068</text:p>
          </table:table-cell>
          <table:table-cell table:style-name="ce187"/>
          <table:table-cell table:style-name="ce203" table:formula="of:=SUM([.H5:.H7])" office:value-type="float" office:value="659.459459459459" calcext:value-type="float">
            <text:p>659.46</text:p>
          </table:table-cell>
          <table:table-cell table:number-columns-repeated="16376"/>
        </table:table-row>
        <table:table-row table:style-name="ro4">
          <table:table-cell/>
          <table:table-cell table:style-name="ce173"/>
          <table:table-cell table:number-columns-repeated="16382"/>
        </table:table-row>
        <table:table-row table:style-name="ro4">
          <table:table-cell/>
          <table:table-cell table:style-name="ce174" office:value-type="string" calcext:value-type="string" table:number-columns-spanned="7" table:number-rows-spanned="1">
            <text:p>CUADRO N° 5</text:p>
          </table:table-cell>
          <table:covered-table-cell table:number-columns-repeated="6" table:style-name="ce174"/>
          <table:table-cell table:number-columns-repeated="16376"/>
        </table:table-row>
        <table:table-row table:style-name="ro4">
          <table:table-cell/>
          <table:table-cell table:style-name="ce173"/>
          <table:table-cell table:number-columns-repeated="16382"/>
        </table:table-row>
        <table:table-row table:style-name="ro4">
          <table:table-cell/>
          <table:table-cell table:style-name="ce175" office:value-type="string" calcext:value-type="string" table:number-columns-spanned="7" table:number-rows-spanned="1">
            <text:p>TABLA DE AMORTIZACION DE INTANGIBLES</text:p>
          </table:table-cell>
          <table:covered-table-cell table:number-columns-repeated="6" table:style-name="ce103"/>
          <table:table-cell table:number-columns-repeated="16376"/>
        </table:table-row>
        <table:table-row table:style-name="ro18">
          <table:table-cell/>
          <table:table-cell table:style-name="ce176" office:value-type="string" calcext:value-type="string">
            <text:p>B. INTANGIBLES</text:p>
          </table:table-cell>
          <table:table-cell table:style-name="ce183" office:value-type="string" calcext:value-type="string">
            <text:p>Valor de compra</text:p>
          </table:table-cell>
          <table:table-cell table:style-name="ce183" office:value-type="string" calcext:value-type="string">
            <text:p>Vida de recupero (años)</text:p>
          </table:table-cell>
          <table:table-cell table:style-name="ce183" office:value-type="string" calcext:value-type="string">
            <text:p>Tasa de amortizacion</text:p>
          </table:table-cell>
          <table:table-cell table:style-name="ce183" office:value-type="string" calcext:value-type="string">
            <text:p>Amortizacion anual</text:p>
          </table:table-cell>
          <table:table-cell table:style-name="ce198" table:number-columns-repeated="2"/>
          <table:table-cell table:number-columns-repeated="16376"/>
        </table:table-row>
        <table:table-row table:style-name="ro4">
          <table:table-cell/>
          <table:table-cell table:style-name="ce177" office:value-type="string" calcext:value-type="string">
            <text:p>diseño de pagina web</text:p>
          </table:table-cell>
          <table:table-cell table:style-name="ce184" table:formula="of:=[$'b) Inversión Inicial'.E18]" office:value-type="float" office:value="59.4594594594595" calcext:value-type="float">
            <text:p>59.46</text:p>
          </table:table-cell>
          <table:table-cell table:style-name="ce188" office:value-type="float" office:value="3" calcext:value-type="float">
            <text:p>3</text:p>
          </table:table-cell>
          <table:table-cell table:style-name="ce192" table:formula="of:=1/[.D14]" office:value-type="float" office:value="0.333333333333333" calcext:value-type="float">
            <text:p>0.333</text:p>
          </table:table-cell>
          <table:table-cell table:style-name="ce195" table:formula="of:=[.C14]*[.E14]" office:value-type="float" office:value="19.8198198198198" calcext:value-type="float">
            <text:p>19.82</text:p>
          </table:table-cell>
          <table:table-cell table:number-columns-repeated="16378"/>
        </table:table-row>
        <table:table-row table:style-name="ro4">
          <table:table-cell/>
          <table:table-cell table:style-name="ce177" office:value-type="string" calcext:value-type="string">
            <text:p>diseño de marca </text:p>
          </table:table-cell>
          <table:table-cell table:style-name="ce184" table:formula="of:=[$'b) Inversión Inicial'.E19]" office:value-type="float" office:value="62.1621621621622" calcext:value-type="float">
            <text:p>62.16</text:p>
          </table:table-cell>
          <table:table-cell table:style-name="ce188" office:value-type="float" office:value="3" calcext:value-type="float">
            <text:p>3</text:p>
          </table:table-cell>
          <table:table-cell table:style-name="ce192" table:formula="of:=1/[.D15]" office:value-type="float" office:value="0.333333333333333" calcext:value-type="float">
            <text:p>0.333</text:p>
          </table:table-cell>
          <table:table-cell table:style-name="ce195" table:formula="of:=[.C15]*[.E15]" office:value-type="float" office:value="20.7207207207207" calcext:value-type="float">
            <text:p>20.72</text:p>
          </table:table-cell>
          <table:table-cell table:style-name="ce199" table:number-columns-repeated="2"/>
          <table:table-cell table:number-columns-repeated="16376"/>
        </table:table-row>
        <table:table-row table:style-name="ro4">
          <table:table-cell/>
          <table:table-cell table:style-name="ce178" office:value-type="string" calcext:value-type="string">
            <text:p>Total</text:p>
          </table:table-cell>
          <table:table-cell table:style-name="ce185" table:formula="of:=SUM([.C14:.C15])" office:value-type="float" office:value="121.621621621622" calcext:value-type="float">
            <text:p>122</text:p>
          </table:table-cell>
          <table:table-cell table:style-name="ce189" table:number-columns-repeated="2"/>
          <table:table-cell table:style-name="ce196" table:formula="of:=SUM([.F14:.F15])" office:value-type="float" office:value="40.5405405405405" calcext:value-type="float">
            <text:p>40.54</text:p>
          </table:table-cell>
          <table:table-cell table:style-name="ce200"/>
          <table:table-cell table:style-name="ce199"/>
          <table:table-cell table:number-columns-repeated="16376"/>
        </table:table-row>
        <table:table-row table:style-name="ro4" table:number-rows-repeated="2">
          <table:table-cell table:number-columns-repeated="6"/>
          <table:table-cell table:style-name="ce199" table:number-columns-repeated="2"/>
          <table:table-cell table:number-columns-repeated="16376"/>
        </table:table-row>
        <table:table-row table:style-name="ro4" table:number-rows-repeated="979">
          <table:table-cell table:number-columns-repeated="16384"/>
        </table:table-row>
        <table:table-row table:style-name="ro8" table:number-rows-repeated="104757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) Costos_producción" table:style-name="ta10">
        <table:table-column table:style-name="co40" table:default-cell-style-name="ce20"/>
        <table:table-column table:style-name="co36" table:default-cell-style-name="ce20"/>
        <table:table-column table:style-name="co41" table:default-cell-style-name="ce20"/>
        <table:table-column table:style-name="co32" table:default-cell-style-name="ce20"/>
        <table:table-column table:style-name="co42" table:default-cell-style-name="ce20"/>
        <table:table-column table:style-name="co30" table:default-cell-style-name="ce20"/>
        <table:table-column table:style-name="co43" table:default-cell-style-name="ce20"/>
        <table:table-column table:style-name="co7" table:default-cell-style-name="ce20"/>
        <table:table-column table:style-name="co13" table:number-columns-repeated="8" table:default-cell-style-name="ce20"/>
        <table:table-column table:style-name="co14" table:number-columns-repeated="16368" table:default-cell-style-name="ce20"/>
        <table:table-row table:style-name="ro4">
          <table:table-cell table:style-name="ce205" table:number-columns-repeated="16"/>
          <table:table-cell table:number-columns-repeated="16368"/>
        </table:table-row>
        <table:table-row table:style-name="ro8">
          <table:table-cell table:style-name="ce205" table:number-columns-repeated="2"/>
          <table:table-cell table:style-name="ce206" office:value-type="string" calcext:value-type="string" table:number-columns-spanned="5" table:number-rows-spanned="1">
            <text:p>CUADRO N° 5</text:p>
          </table:table-cell>
          <table:covered-table-cell table:number-columns-repeated="4" table:style-name="ce35"/>
          <table:table-cell table:style-name="ce205" table:number-columns-repeated="9"/>
          <table:table-cell table:number-columns-repeated="16368"/>
        </table:table-row>
        <table:table-row table:style-name="ro8">
          <table:table-cell table:style-name="ce205" table:number-columns-repeated="2"/>
          <table:table-cell table:style-name="ce206" office:value-type="string" calcext:value-type="string" table:number-columns-spanned="5" table:number-rows-spanned="1">
            <text:p>COSTOS DE PRODUCCIÓN O DE VENTAS</text:p>
          </table:table-cell>
          <table:covered-table-cell table:number-columns-repeated="4" table:style-name="ce35"/>
          <table:table-cell table:style-name="ce205" table:number-columns-repeated="9"/>
          <table:table-cell table:number-columns-repeated="16368"/>
        </table:table-row>
        <table:table-row table:style-name="ro7">
          <table:table-cell table:style-name="ce205" table:number-columns-repeated="2"/>
          <table:table-cell table:style-name="ce207" office:value-type="string" calcext:value-type="string" table:number-columns-spanned="5" table:number-rows-spanned="1">
            <text:p>100 unidades del primer mes</text:p>
          </table:table-cell>
          <table:covered-table-cell table:number-columns-repeated="4" table:style-name="ce207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08" office:value-type="string" calcext:value-type="string" table:number-columns-spanned="1" table:number-rows-spanned="2">
            <text:p>RUBRO</text:p>
          </table:table-cell>
          <table:table-cell table:style-name="ce217" office:value-type="string" calcext:value-type="string" table:number-columns-spanned="1" table:number-rows-spanned="2">
            <text:p>COSTO UNITARIO</text:p>
          </table:table-cell>
          <table:table-cell table:style-name="ce225" office:value-type="string" calcext:value-type="string" table:number-columns-spanned="1" table:number-rows-spanned="2">
            <text:p>UNIDADES REQUERIDAS</text:p>
          </table:table-cell>
          <table:table-cell table:style-name="ce231" office:value-type="string" calcext:value-type="string" table:number-columns-spanned="2" table:number-rows-spanned="1">
            <text:p>COSTO TOTAL</text:p>
          </table:table-cell>
          <table:covered-table-cell table:style-name="ce234"/>
          <table:table-cell table:style-name="ce205" table:number-columns-repeated="9"/>
          <table:table-cell table:number-columns-repeated="16368"/>
        </table:table-row>
        <table:table-row table:style-name="ro7">
          <table:table-cell table:style-name="ce205" table:number-columns-repeated="2"/>
          <table:covered-table-cell table:style-name="ce209"/>
          <table:covered-table-cell table:style-name="ce218"/>
          <table:covered-table-cell table:style-name="ce226"/>
          <table:table-cell table:style-name="ce232" office:value-type="string" calcext:value-type="string">
            <text:p>FIJO</text:p>
          </table:table-cell>
          <table:table-cell table:style-name="ce235" office:value-type="string" calcext:value-type="string">
            <text:p>VARIABLE</text:p>
          </table:table-cell>
          <table:table-cell table:style-name="ce205" table:number-columns-repeated="9"/>
          <table:table-cell table:number-columns-repeated="16368"/>
        </table:table-row>
        <table:table-row table:style-name="ro19">
          <table:table-cell table:style-name="ce205" table:number-columns-repeated="2"/>
          <table:table-cell table:style-name="ce210" office:value-type="string" calcext:value-type="string">
            <text:p>COSTOS DE PRODUCCION O VENTAS</text:p>
          </table:table-cell>
          <table:table-cell table:style-name="ce219" table:number-columns-repeated="3"/>
          <table:table-cell table:style-name="ce236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1" office:value-type="string" calcext:value-type="string">
            <text:p><text:s/>Materia Prima Directa MPD</text:p>
          </table:table-cell>
          <table:table-cell table:style-name="ce220" table:formula="of:=SUM([.D9:.D14])" office:value-type="float" office:value="7.83" calcext:value-type="float">
            <text:p>7.83</text:p>
          </table:table-cell>
          <table:table-cell table:style-name="ce227" table:number-columns-repeated="2"/>
          <table:table-cell table:style-name="ce237" table:formula="of:=SUM([.G9:.G14])" office:value-type="float" office:value="775.85" calcext:value-type="float">
            <text:p>775.85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Materia prima (lana de ovino teñida )</text:p>
          </table:table-cell>
          <table:table-cell table:style-name="ce221" table:formula="of:=[$DATOS.H17]" office:value-type="float" office:value="0.13" calcext:value-type="float">
            <text:p>0.13</text:p>
          </table:table-cell>
          <table:table-cell table:style-name="ce223" office:value-type="float" office:value="45" calcext:value-type="float">
            <text:p>45</text:p>
          </table:table-cell>
          <table:table-cell table:style-name="ce223"/>
          <table:table-cell table:style-name="ce238" table:formula="of:=[.D9]*[.E9]" office:value-type="float" office:value="5.85" calcext:value-type="float">
            <text:p>5.85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cierre metalico </text:p>
          </table:table-cell>
          <table:table-cell table:style-name="ce221" office:value-type="float" office:value="0.1" calcext:value-type="float">
            <text:p>0.10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0]*[.E10]" office:value-type="float" office:value="10" calcext:value-type="float">
            <text:p>10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funda de cojin</text:p>
          </table:table-cell>
          <table:table-cell table:style-name="ce221" office:value-type="float" office:value="6.94" calcext:value-type="float">
            <text:p>6.94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1]*[.E11]" office:value-type="float" office:value="694" calcext:value-type="float">
            <text:p>694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etiquetado y empaque</text:p>
          </table:table-cell>
          <table:table-cell table:style-name="ce221" office:value-type="float" office:value="0.06" calcext:value-type="float">
            <text:p>0.06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2]*[.E12]" office:value-type="float" office:value="6" calcext:value-type="float">
            <text:p>6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3" office:value-type="string" calcext:value-type="string">
            <text:p>moldes de diseño de serigrafia</text:p>
          </table:table-cell>
          <table:table-cell table:style-name="ce221" office:value-type="float" office:value="0.04" calcext:value-type="float">
            <text:p>0.04</text:p>
          </table:table-cell>
          <table:table-cell table:style-name="ce223" office:value-type="float" office:value="100" calcext:value-type="float">
            <text:p>100</text:p>
          </table:table-cell>
          <table:table-cell table:style-name="ce233"/>
          <table:table-cell table:style-name="ce238" table:formula="of:=[.D13]*[.E13]" office:value-type="float" office:value="4" calcext:value-type="float">
            <text:p>4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hilos finos</text:p>
          </table:table-cell>
          <table:table-cell table:style-name="ce221" office:value-type="float" office:value="0.56" calcext:value-type="float">
            <text:p>0.56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4]*[.E14]" office:value-type="float" office:value="56" calcext:value-type="float">
            <text:p>56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1" office:value-type="string" calcext:value-type="string">
            <text:p><text:s/>Mano de Obra Directa MOD</text:p>
          </table:table-cell>
          <table:table-cell table:style-name="ce220" table:formula="of:=[.D16]+[.D17]+[.D18]" office:value-type="float" office:value="8.34" calcext:value-type="float">
            <text:p>8.34</text:p>
          </table:table-cell>
          <table:table-cell table:style-name="ce227" table:number-columns-repeated="2"/>
          <table:table-cell table:style-name="ce239" table:formula="of:=[.G16]+[.G17]+[.G18]" office:value-type="float" office:value="834" calcext:value-type="float">
            <text:p>834.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dibujante</text:p>
          </table:table-cell>
          <table:table-cell table:style-name="ce221" office:value-type="float" office:value="0.56" calcext:value-type="float">
            <text:p>0.56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6]*[.E16]" office:value-type="float" office:value="56" calcext:value-type="float">
            <text:p>56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tejedoras o bordadoras</text:p>
          </table:table-cell>
          <table:table-cell table:style-name="ce221" table:formula="of:=Mano_de_obra_tejedoras" office:value-type="float" office:value="7.22" calcext:value-type="float">
            <text:p>7.2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7]*[.E17]" office:value-type="float" office:value="722" calcext:value-type="float">
            <text:p>722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2" office:value-type="string" calcext:value-type="string">
            <text:p>costurera</text:p>
          </table:table-cell>
          <table:table-cell table:style-name="ce221" office:value-type="float" office:value="0.56" calcext:value-type="float">
            <text:p>0.56</text:p>
          </table:table-cell>
          <table:table-cell table:style-name="ce223" office:value-type="float" office:value="100" calcext:value-type="float">
            <text:p>100</text:p>
          </table:table-cell>
          <table:table-cell table:style-name="ce223"/>
          <table:table-cell table:style-name="ce238" table:formula="of:=[.D18]*[.E18]" office:value-type="float" office:value="56" calcext:value-type="float">
            <text:p>56.00</text:p>
          </table:table-cell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1" office:value-type="string" calcext:value-type="string">
            <text:p>Costos Indirectos de Fabricacion CIF</text:p>
          </table:table-cell>
          <table:table-cell table:style-name="ce222"/>
          <table:table-cell table:style-name="ce227"/>
          <table:table-cell table:style-name="ce222" table:formula="of:=SUM([.F20:.F24])" office:value-type="float" office:value="208" calcext:value-type="float">
            <text:p>208</text:p>
          </table:table-cell>
          <table:table-cell table:style-name="ce240" table:formula="of:=SUM([.G20:.G24])" office:value-type="float" office:value="0" calcext:value-type="float">
            <text:p>0</text:p>
          </table:table-cell>
          <table:table-cell table:style-name="ce243"/>
          <table:table-cell table:style-name="ce205" table:number-columns-repeated="8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4" office:value-type="string" calcext:value-type="string">
            <text:p>Agente de carga</text:p>
          </table:table-cell>
          <table:table-cell table:style-name="ce223" office:value-type="float" office:value="56" calcext:value-type="float">
            <text:p>56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20]*[.E20]" office:value-type="float" office:value="56" calcext:value-type="float">
            <text:p>56</text:p>
          </table:table-cell>
          <table:table-cell table:style-name="ce241"/>
          <table:table-cell table:style-name="ce244"/>
          <table:table-cell table:style-name="ce205" table:number-columns-repeated="8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31" office:value-type="string" calcext:value-type="string">
            <text:p>envio a las zonas rurales- transporte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21]" office:value-type="float" office:value="3" calcext:value-type="float">
            <text:p>3</text:p>
          </table:table-cell>
          <table:table-cell table:style-name="ce241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3" office:value-type="string" calcext:value-type="string">
            <text:p>mantenimiento de las maquinas</text:p>
          </table:table-cell>
          <table:table-cell table:style-name="ce223" office:value-type="float" office:value="14" calcext:value-type="float">
            <text:p>14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22]" office:value-type="float" office:value="14" calcext:value-type="float">
            <text:p>14</text:p>
          </table:table-cell>
          <table:table-cell table:style-name="ce241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31" office:value-type="string" calcext:value-type="string">
            <text:p>transporte por exportación ( trámites y otros)</text:p>
          </table:table-cell>
          <table:table-cell table:style-name="ce223" office:value-type="float" office:value="69" calcext:value-type="float">
            <text:p>69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23]" office:value-type="float" office:value="69" calcext:value-type="float">
            <text:p>69</text:p>
          </table:table-cell>
          <table:table-cell table:style-name="ce241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31" office:value-type="string" calcext:value-type="string">
            <text:p>transporte y envios <text:s/>(flete)</text:p>
          </table:table-cell>
          <table:table-cell table:style-name="ce223" office:value-type="float" office:value="66" calcext:value-type="float">
            <text:p>66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24]" office:value-type="float" office:value="66" calcext:value-type="float">
            <text:p>66</text:p>
          </table:table-cell>
          <table:table-cell table:style-name="ce241"/>
          <table:table-cell table:style-name="ce205" table:number-columns-repeated="9"/>
          <table:table-cell table:number-columns-repeated="16368"/>
        </table:table-row>
        <table:table-row table:style-name="ro7">
          <table:table-cell table:style-name="ce205" table:number-columns-repeated="2"/>
          <table:table-cell table:style-name="ce215" office:value-type="string" calcext:value-type="string">
            <text:p>COSTOS DE PRODUCCION MES 1</text:p>
          </table:table-cell>
          <table:table-cell table:style-name="ce224"/>
          <table:table-cell table:style-name="ce228"/>
          <table:table-cell table:style-name="ce228" table:formula="of:=SUM([.F8]+[.F19])" office:value-type="float" office:value="208" calcext:value-type="float">
            <text:p>208</text:p>
          </table:table-cell>
          <table:table-cell table:style-name="ce242" table:formula="of:=SUM([.G8]+[.G15]+[.G19])" office:value-type="float" office:value="1609.85" calcext:value-type="float">
            <text:p>1,610</text:p>
          </table:table-cell>
          <table:table-cell table:style-name="ce229"/>
          <table:table-cell table:style-name="ce205" table:number-columns-repeated="8"/>
          <table:table-cell table:number-columns-repeated="16368"/>
        </table:table-row>
        <table:table-row table:style-name="ro4">
          <table:table-cell table:style-name="ce205" table:number-columns-repeated="2"/>
          <table:table-cell table:style-name="ce216" table:number-columns-spanned="2" table:number-rows-spanned="1"/>
          <table:covered-table-cell table:style-name="ce35"/>
          <table:table-cell table:style-name="ce229" table:number-columns-repeated="3"/>
          <table:table-cell table:style-name="ce205" table:number-columns-repeated="9"/>
          <table:table-cell table:number-columns-repeated="16368"/>
        </table:table-row>
        <table:table-row table:style-name="ro4">
          <table:table-cell table:style-name="ce205" table:number-columns-repeated="16"/>
          <table:table-cell table:number-columns-repeated="16368"/>
        </table:table-row>
        <table:table-row table:style-name="ro4">
          <table:table-cell table:style-name="ce205" table:number-columns-repeated="4"/>
          <table:table-cell table:style-name="ce230"/>
          <table:table-cell table:style-name="ce205" table:number-columns-repeated="11"/>
          <table:table-cell table:number-columns-repeated="16368"/>
        </table:table-row>
        <table:table-row table:style-name="ro4">
          <table:table-cell table:style-name="ce205" table:number-columns-repeated="16"/>
          <table:table-cell table:number-columns-repeated="16368"/>
        </table:table-row>
        <table:table-row table:style-name="ro4">
          <table:table-cell table:style-name="ce205" table:number-columns-repeated="4"/>
          <table:table-cell table:style-name="ce229"/>
          <table:table-cell table:style-name="ce205" table:number-columns-repeated="11"/>
          <table:table-cell table:number-columns-repeated="16368"/>
        </table:table-row>
        <table:table-row table:style-name="ro4">
          <table:table-cell table:style-name="ce205" table:number-columns-repeated="16"/>
          <table:table-cell table:number-columns-repeated="16368"/>
        </table:table-row>
        <table:table-row table:style-name="ro4" table:number-rows-repeated="963">
          <table:table-cell table:style-name="ce205" table:number-columns-repeated="16"/>
          <table:table-cell table:number-columns-repeated="16368"/>
        </table:table-row>
        <table:table-row table:style-name="ro8" table:number-rows-repeated="104758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gimen tributario y laboral" table:style-name="ta11">
        <table:table-column table:style-name="co1" table:number-columns-repeated="16384" table:default-cell-style-name="Default"/>
        <table:table-row table:style-name="ro1">
          <table:table-cell/>
          <table:table-cell>
            <draw:frame draw:z-index="0" draw:name="Imagen 1" draw:style-name="gr1" draw:text-style-name="P1" svg:width="23.01cm" svg:height="14.366cm" svg:x="0.688cm" svg:y="0.106cm">
              <draw:image xlink:href="Pictures/100000000000055600000300E8C96A6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named-expressions>
          <table:named-range table:name="_Toc64714921" table:base-cell-address="$Hoja1.$A$1" table:cell-range-address="$'Regimen tributario y laboral'.$B$2"/>
        </table:named-expressions>
      </table:table>
      <table:table table:name="e) Planilla" table:style-name="ta12">
        <table:table-column table:style-name="co19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6" table:number-columns-repeated="2" table:default-cell-style-name="ce20"/>
        <table:table-column table:style-name="co48" table:default-cell-style-name="ce20"/>
        <table:table-column table:style-name="co49" table:default-cell-style-name="ce20"/>
        <table:table-column table:style-name="co13" table:number-columns-repeated="12" table:default-cell-style-name="ce20"/>
        <table:table-column table:style-name="co14" table:number-columns-repeated="16363" table:default-cell-style-name="ce20"/>
        <table:table-row table:style-name="ro8">
          <table:table-cell table:number-columns-repeated="16384"/>
        </table:table-row>
        <table:table-row table:style-name="ro4">
          <table:table-cell table:style-name="ce205"/>
          <table:table-cell table:style-name="ce245" office:value-type="string" calcext:value-type="string" table:number-columns-spanned="8" table:number-rows-spanned="1">
            <text:p>CUADRO N° 6</text:p>
          </table:table-cell>
          <table:covered-table-cell table:number-columns-repeated="7" table:style-name="ce245"/>
          <table:table-cell table:style-name="ce205" table:number-columns-repeated="12"/>
          <table:table-cell table:number-columns-repeated="16363"/>
        </table:table-row>
        <table:table-row table:style-name="ro8">
          <table:table-cell table:style-name="ce205"/>
          <table:table-cell table:style-name="ce246" office:value-type="string" calcext:value-type="string" table:number-columns-spanned="8" table:number-rows-spanned="1">
            <text:p>PRESUPUESTO ANUAL DE REMUNERACIONES</text:p>
          </table:table-cell>
          <table:covered-table-cell table:number-columns-repeated="7" table:style-name="ce35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4" table:number-columns-repeated="8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7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35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4" table:number-columns-repeated="8"/>
          <table:table-cell table:style-name="ce205" table:number-columns-repeated="12"/>
          <table:table-cell table:number-columns-repeated="16363"/>
        </table:table-row>
        <table:table-row table:style-name="ro7">
          <table:table-cell table:style-name="ce205"/>
          <table:table-cell table:style-name="ce248" office:value-type="string" calcext:value-type="string">
            <text:p>Cargo</text:p>
          </table:table-cell>
          <table:table-cell table:style-name="ce248" office:value-type="string" calcext:value-type="string">
            <text:p>Básico mes</text:p>
          </table:table-cell>
          <table:table-cell table:style-name="ce248" office:value-type="string" calcext:value-type="string">
            <text:p>Anual</text:p>
          </table:table-cell>
          <table:table-cell table:style-name="ce248" office:value-type="string" calcext:value-type="string">
            <text:p>Beneficios(*)</text:p>
          </table:table-cell>
          <table:table-cell table:style-name="ce248" office:value-type="string" calcext:value-type="string">
            <text:p>N° Trab.</text:p>
          </table:table-cell>
          <table:table-cell table:style-name="ce248" office:value-type="string" calcext:value-type="string">
            <text:p>Sub Total</text:p>
          </table:table-cell>
          <table:table-cell table:style-name="ce248" office:value-type="string" calcext:value-type="string">
            <text:p>ESSALUD (**)</text:p>
          </table:table-cell>
          <table:table-cell table:style-name="ce232" office:value-type="string" calcext:value-type="string">
            <text:p>TOTAL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9" office:value-type="string" calcext:value-type="string">
            <text:p>Area de Administración</text:p>
          </table:table-cell>
          <table:table-cell table:style-name="ce250" table:number-columns-repeated="6"/>
          <table:table-cell table:style-name="ce258" table:formula="of:=[.I9]+[.I10]" office:value-type="float" office:value="10300.5" calcext:value-type="float">
            <text:p>10300.5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31" office:value-type="string" calcext:value-type="string">
            <text:p>Gerente</text:p>
          </table:table-cell>
          <table:table-cell table:style-name="ce252" office:value-type="float" office:value="400" calcext:value-type="float">
            <text:p>400.00</text:p>
          </table:table-cell>
          <table:table-cell table:style-name="ce39" table:formula="of:=[.C9]*12" office:value-type="float" office:value="4800" calcext:value-type="float">
            <text:p>4800</text:p>
          </table:table-cell>
          <table:table-cell table:style-name="ce39" table:formula="of:=[.C9]*1.5" office:value-type="float" office:value="600" calcext:value-type="float">
            <text:p>60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D9]+[.E9]*[.F9]" office:value-type="float" office:value="5400" calcext:value-type="float">
            <text:p>5400</text:p>
          </table:table-cell>
          <table:table-cell table:style-name="ce39" table:formula="of:=[.G9]*0.09" office:value-type="float" office:value="486" calcext:value-type="float">
            <text:p>486</text:p>
          </table:table-cell>
          <table:table-cell table:style-name="ce259" table:formula="of:=[.G9]+[.H9]" office:value-type="float" office:value="5886" calcext:value-type="float">
            <text:p>5886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31" office:value-type="string" calcext:value-type="string">
            <text:p>Administrador</text:p>
          </table:table-cell>
          <table:table-cell table:style-name="ce252" office:value-type="float" office:value="300" calcext:value-type="float">
            <text:p>300.00</text:p>
          </table:table-cell>
          <table:table-cell table:style-name="ce39" table:formula="of:=[.C10]*12" office:value-type="float" office:value="3600" calcext:value-type="float">
            <text:p>3600</text:p>
          </table:table-cell>
          <table:table-cell table:style-name="ce39" table:formula="of:=[.C10]*1.5" office:value-type="float" office:value="450" calcext:value-type="float">
            <text:p>45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D10]+[.E10]*[.F10]" office:value-type="float" office:value="4050" calcext:value-type="float">
            <text:p>4050</text:p>
          </table:table-cell>
          <table:table-cell table:style-name="ce256" table:formula="of:=[.G10]*0.09" office:value-type="float" office:value="364.5" calcext:value-type="float">
            <text:p>365</text:p>
          </table:table-cell>
          <table:table-cell table:style-name="ce260" table:formula="of:=[.G10]+[.H10]" office:value-type="float" office:value="4414.5" calcext:value-type="float">
            <text:p>4415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50" office:value-type="string" calcext:value-type="string">
            <text:p>Area de ventas</text:p>
          </table:table-cell>
          <table:table-cell table:style-name="ce252"/>
          <table:table-cell table:style-name="ce250"/>
          <table:table-cell table:style-name="ce39" table:number-columns-repeated="4"/>
          <table:table-cell table:style-name="ce261" table:formula="of:=[.I12]" office:value-type="float" office:value="3825.9" calcext:value-type="float">
            <text:p>3826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39" office:value-type="string" calcext:value-type="string">
            <text:p>Vendedora</text:p>
          </table:table-cell>
          <table:table-cell table:style-name="ce252" office:value-type="float" office:value="260" calcext:value-type="float">
            <text:p>260.00</text:p>
          </table:table-cell>
          <table:table-cell table:style-name="ce250" table:formula="of:=[.C12]*12" office:value-type="float" office:value="3120" calcext:value-type="float">
            <text:p>3120</text:p>
          </table:table-cell>
          <table:table-cell table:style-name="ce39" table:formula="of:=[.C12]*1.5" office:value-type="float" office:value="390" calcext:value-type="float">
            <text:p>39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D12]+[.E12]*[.F12]" office:value-type="float" office:value="3510" calcext:value-type="float">
            <text:p>3510</text:p>
          </table:table-cell>
          <table:table-cell table:style-name="ce256" table:formula="of:=[.G12]*0.09" office:value-type="float" office:value="315.9" calcext:value-type="float">
            <text:p>316</text:p>
          </table:table-cell>
          <table:table-cell table:style-name="ce260" table:formula="of:=[.G12]+[.H12]" office:value-type="float" office:value="3825.9" calcext:value-type="float">
            <text:p>3826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51" office:value-type="string" calcext:value-type="string">
            <text:p>TOTAL</text:p>
          </table:table-cell>
          <table:table-cell table:style-name="ce251" table:formula="of:=[.C12]+[.C9]" office:value-type="float" office:value="660" calcext:value-type="float">
            <text:p>660</text:p>
          </table:table-cell>
          <table:table-cell table:style-name="ce253" table:formula="of:=SUM([.D9:.D12])" office:value-type="float" office:value="11520" calcext:value-type="float">
            <text:p>11520.00</text:p>
          </table:table-cell>
          <table:table-cell table:style-name="ce251"/>
          <table:table-cell table:style-name="ce251" table:formula="of:=[.F9]+[.F12]" office:value-type="float" office:value="2" calcext:value-type="float">
            <text:p>2</text:p>
          </table:table-cell>
          <table:table-cell table:style-name="ce255" table:formula="of:=SUM([.G9:.G12])" office:value-type="float" office:value="12960" calcext:value-type="float">
            <text:p>12960.00</text:p>
          </table:table-cell>
          <table:table-cell table:style-name="ce257" table:formula="of:=[.H9]+[.H10]+[.H12]" office:value-type="float" office:value="1166.4" calcext:value-type="float">
            <text:p>1166</text:p>
          </table:table-cell>
          <table:table-cell table:style-name="ce257" table:formula="of:=[.I8]+[.I11]" office:value-type="float" office:value="14126.4" calcext:value-type="float">
            <text:p>14126</text:p>
          </table:table-cell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4" office:value-type="string" calcext:value-type="string">
            <text:p>(*)tiene gratificaciones y CTS (1/2 sueldo)</text:p>
          </table:table-cell>
          <table:table-cell table:style-name="ce244" table:number-columns-repeated="7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4" office:value-type="string" calcext:value-type="string">
            <text:p>(**) Aporte patronal 9%</text:p>
          </table:table-cell>
          <table:table-cell table:style-name="ce244" table:number-columns-repeated="7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/>
          <table:table-cell table:style-name="ce244" table:number-columns-repeated="8"/>
          <table:table-cell table:style-name="ce205" table:number-columns-repeated="12"/>
          <table:table-cell table:number-columns-repeated="16363"/>
        </table:table-row>
        <table:table-row table:style-name="ro4">
          <table:table-cell table:style-name="ce205" table:number-columns-repeated="5"/>
          <table:table-cell table:style-name="ce254"/>
          <table:table-cell table:style-name="ce205" table:number-columns-repeated="15"/>
          <table:table-cell table:number-columns-repeated="16363"/>
        </table:table-row>
        <table:table-row table:style-name="ro4" table:number-rows-repeated="916">
          <table:table-cell table:style-name="ce205" table:number-columns-repeated="5"/>
          <table:table-cell table:style-name="ce254"/>
          <table:table-cell table:style-name="ce205" table:number-columns-repeated="15"/>
          <table:table-cell table:number-columns-repeated="16363"/>
        </table:table-row>
        <table:table-row table:style-name="ro8" table:number-rows-repeated="104764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) Gastos_Operativos" table:style-name="ta13">
        <table:table-column table:style-name="co40" table:default-cell-style-name="ce20"/>
        <table:table-column table:style-name="co36" table:default-cell-style-name="ce20"/>
        <table:table-column table:style-name="co41" table:default-cell-style-name="ce20"/>
        <table:table-column table:style-name="co37" table:default-cell-style-name="ce20"/>
        <table:table-column table:style-name="co42" table:default-cell-style-name="ce20"/>
        <table:table-column table:style-name="co7" table:default-cell-style-name="ce20"/>
        <table:table-column table:style-name="co50" table:default-cell-style-name="ce20"/>
        <table:table-column table:style-name="co51" table:default-cell-style-name="ce20"/>
        <table:table-column table:style-name="co13" table:number-columns-repeated="18" table:default-cell-style-name="ce20"/>
        <table:table-column table:style-name="co14" table:number-columns-repeated="16358" table:default-cell-style-name="ce20"/>
        <table:table-row table:style-name="ro4">
          <table:table-cell table:style-name="ce205" table:number-columns-repeated="26"/>
          <table:table-cell table:number-columns-repeated="16358"/>
        </table:table-row>
        <table:table-row table:style-name="ro8">
          <table:table-cell table:style-name="ce205" table:number-columns-repeated="2"/>
          <table:table-cell table:style-name="ce206" office:value-type="string" calcext:value-type="string" table:number-columns-spanned="6" table:number-rows-spanned="1">
            <text:p>CUADRO N° 7</text:p>
          </table:table-cell>
          <table:covered-table-cell table:number-columns-repeated="5" table:style-name="ce35"/>
          <table:table-cell table:style-name="ce205" table:number-columns-repeated="18"/>
          <table:table-cell table:number-columns-repeated="16358"/>
        </table:table-row>
        <table:table-row table:style-name="ro8">
          <table:table-cell table:style-name="ce205" table:number-columns-repeated="2"/>
          <table:table-cell table:style-name="ce206" office:value-type="string" calcext:value-type="string" table:number-columns-spanned="6" table:number-rows-spanned="1">
            <text:p>GASTOS OPERATIVOS PRIMER MES</text:p>
          </table:table-cell>
          <table:covered-table-cell table:number-columns-repeated="5" table:style-name="ce35"/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6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2" office:value-type="string" calcext:value-type="string" table:number-columns-spanned="1" table:number-rows-spanned="2">
            <text:p>RUBRO</text:p>
          </table:table-cell>
          <table:table-cell table:style-name="ce273" office:value-type="string" calcext:value-type="string" table:number-columns-spanned="1" table:number-rows-spanned="2">
            <text:p>COSTO UNITARIO</text:p>
          </table:table-cell>
          <table:table-cell table:style-name="ce273" office:value-type="string" calcext:value-type="string" table:number-columns-spanned="1" table:number-rows-spanned="2">
            <text:p>UNIDADES REQUERIDAS</text:p>
          </table:table-cell>
          <table:table-cell table:style-name="ce282" office:value-type="string" calcext:value-type="string" table:number-columns-spanned="2" table:number-rows-spanned="1">
            <text:p>COSTO </text:p>
          </table:table-cell>
          <table:covered-table-cell table:style-name="ce284"/>
          <table:table-cell table:style-name="ce285" office:value-type="string" calcext:value-type="string" table:number-columns-spanned="1" table:number-rows-spanned="2">
            <text:p>TOTAL</text:p>
          </table:table-cell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"/>
          <table:covered-table-cell table:style-name="ce263"/>
          <table:covered-table-cell table:number-columns-repeated="2" table:style-name="ce274"/>
          <table:table-cell table:style-name="ce283" office:value-type="string" calcext:value-type="string">
            <text:p>FIJO</text:p>
          </table:table-cell>
          <table:table-cell table:style-name="ce283" office:value-type="string" calcext:value-type="string">
            <text:p>VARIABLE</text:p>
          </table:table-cell>
          <table:covered-table-cell table:style-name="ce286"/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"/>
          <table:table-cell table:style-name="ce264" office:value-type="string" calcext:value-type="string">
            <text:p>GASTOS DE ADMINISTRACION</text:p>
          </table:table-cell>
          <table:table-cell table:style-name="ce275" table:number-columns-repeated="4"/>
          <table:table-cell table:style-name="ce287"/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5" office:value-type="string" calcext:value-type="string">
            <text:p>*Gerente</text:p>
          </table:table-cell>
          <table:table-cell table:style-name="ce276" table:formula="of:=[$'e) Planilla'.I9]/12" office:value-type="float" office:value="490.5" calcext:value-type="float">
            <text:p>491</text:p>
          </table:table-cell>
          <table:table-cell table:style-name="ce276" office:value-type="float" office:value="1" calcext:value-type="float">
            <text:p>1</text:p>
          </table:table-cell>
          <table:table-cell table:style-name="ce276" table:formula="of:=[.D8]" office:value-type="float" office:value="490.5" calcext:value-type="float">
            <text:p>491</text:p>
          </table:table-cell>
          <table:table-cell table:style-name="ce276"/>
          <table:table-cell table:style-name="ce288" table:formula="of:=[.F8]+[.G8]" office:value-type="float" office:value="490.5" calcext:value-type="float">
            <text:p>491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5" office:value-type="string" calcext:value-type="string">
            <text:p>*Administrador</text:p>
          </table:table-cell>
          <table:table-cell table:style-name="ce276" table:formula="of:=[$'e) Planilla'.I10]/12" office:value-type="float" office:value="367.875" calcext:value-type="float">
            <text:p>368</text:p>
          </table:table-cell>
          <table:table-cell table:style-name="ce276" office:value-type="float" office:value="1" calcext:value-type="float">
            <text:p>1</text:p>
          </table:table-cell>
          <table:table-cell table:style-name="ce276" table:formula="of:=[.D9]" office:value-type="float" office:value="367.875" calcext:value-type="float">
            <text:p>368</text:p>
          </table:table-cell>
          <table:table-cell table:style-name="ce276"/>
          <table:table-cell table:style-name="ce288" table:formula="of:=[.F9]+[.G9]" office:value-type="float" office:value="367.875" calcext:value-type="float">
            <text:p>368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5" office:value-type="string" calcext:value-type="string">
            <text:p>*contador (servicios no personales)</text:p>
          </table:table-cell>
          <table:table-cell table:style-name="ce276" office:value-type="float" office:value="80" calcext:value-type="float">
            <text:p>80</text:p>
          </table:table-cell>
          <table:table-cell table:style-name="ce276" office:value-type="float" office:value="1" calcext:value-type="float">
            <text:p>1</text:p>
          </table:table-cell>
          <table:table-cell table:style-name="ce276" table:formula="of:=[.D10]" office:value-type="float" office:value="80" calcext:value-type="float">
            <text:p>80</text:p>
          </table:table-cell>
          <table:table-cell table:style-name="ce276"/>
          <table:table-cell table:style-name="ce288" table:formula="of:=[.F10]" office:value-type="float" office:value="80" calcext:value-type="float">
            <text:p>80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6" office:value-type="string" calcext:value-type="string">
            <text:p>Servicios: Agua, luz, telefono e internet</text:p>
          </table:table-cell>
          <table:table-cell table:style-name="ce223" office:value-type="float" office:value="17" calcext:value-type="float">
            <text:p>17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1]*[.E11]" office:value-type="float" office:value="17" calcext:value-type="float">
            <text:p>17</text:p>
          </table:table-cell>
          <table:table-cell table:style-name="ce223"/>
          <table:table-cell table:style-name="ce288" table:formula="of:=[.F11]+[.G11]" office:value-type="float" office:value="17" calcext:value-type="float">
            <text:p>17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6" office:value-type="string" calcext:value-type="string">
            <text:p>alquiler del local</text:p>
          </table:table-cell>
          <table:table-cell table:style-name="ce223" office:value-type="float" office:value="250" calcext:value-type="float">
            <text:p>250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2]" office:value-type="float" office:value="250" calcext:value-type="float">
            <text:p>250</text:p>
          </table:table-cell>
          <table:table-cell table:style-name="ce223"/>
          <table:table-cell table:style-name="ce288" table:formula="of:=[.F12]+[.G12]" office:value-type="float" office:value="250" calcext:value-type="float">
            <text:p>250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7" office:value-type="string" calcext:value-type="string">
            <text:p>articulos de limpieza</text:p>
          </table:table-cell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3]" office:value-type="float" office:value="4" calcext:value-type="float">
            <text:p>4</text:p>
          </table:table-cell>
          <table:table-cell table:style-name="ce223"/>
          <table:table-cell table:style-name="ce288" table:formula="of:=[.F13]+[.G13]" office:value-type="float" office:value="4" calcext:value-type="float">
            <text:p>4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6" office:value-type="string" calcext:value-type="string">
            <text:p>Utiles de oficina</text:p>
          </table:table-cell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4]" office:value-type="float" office:value="4" calcext:value-type="float">
            <text:p>4</text:p>
          </table:table-cell>
          <table:table-cell table:style-name="ce223"/>
          <table:table-cell table:style-name="ce288" table:formula="of:=[.F14]+[.G14]" office:value-type="float" office:value="4" calcext:value-type="float">
            <text:p>4</text:p>
          </table:table-cell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"/>
          <table:table-cell table:style-name="ce211" office:value-type="string" calcext:value-type="string">
            <text:p>TOTAL GASTOS DE ADMINISTRACION</text:p>
          </table:table-cell>
          <table:table-cell table:style-name="ce222" table:formula="of:=SUM([.D8:.D14])" office:value-type="float" office:value="1213.375" calcext:value-type="float">
            <text:p>1,213</text:p>
          </table:table-cell>
          <table:table-cell table:style-name="ce222"/>
          <table:table-cell table:style-name="ce222" table:formula="of:=SUM([.F8:.F14])" office:value-type="float" office:value="1213.375" calcext:value-type="float">
            <text:p>1,213</text:p>
          </table:table-cell>
          <table:table-cell table:style-name="ce222" table:formula="of:=SUM([.G7:.G14])" office:value-type="float" office:value="0" calcext:value-type="float">
            <text:p>0</text:p>
          </table:table-cell>
          <table:table-cell table:style-name="ce240" table:formula="of:=[.F15]+[.G15]" office:value-type="float" office:value="1213.375" calcext:value-type="float">
            <text:p>1,213</text:p>
          </table:table-cell>
          <table:table-cell table:style-name="ce229"/>
          <table:table-cell table:style-name="ce205" table:number-columns-repeated="17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68" office:value-type="string" calcext:value-type="string">
            <text:p>GASTOS DE VENTAS</text:p>
          </table:table-cell>
          <table:table-cell table:style-name="ce276" table:number-columns-repeated="4"/>
          <table:table-cell table:style-name="ce288" table:formula="of:=[.H17]+[.H18]+[.H19]" office:value-type="float" office:value="346.825" calcext:value-type="float">
            <text:p>347</text:p>
          </table:table-cell>
          <table:table-cell table:style-name="ce205" table:number-columns-repeated="2"/>
          <table:table-cell table:style-name="ce230"/>
          <table:table-cell table:style-name="ce205" table:number-columns-repeated="15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14" office:value-type="string" calcext:value-type="string">
            <text:p>Sueldos del personal de ventas</text:p>
          </table:table-cell>
          <table:table-cell table:style-name="ce223" table:formula="of:=[$'e) Planilla'.I12]/12" office:value-type="float" office:value="318.825" calcext:value-type="float">
            <text:p>319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7]" office:value-type="float" office:value="318.825" calcext:value-type="float">
            <text:p>319</text:p>
          </table:table-cell>
          <table:table-cell table:style-name="ce223"/>
          <table:table-cell table:style-name="ce288" table:formula="of:=[.F17]+[.G17]" office:value-type="float" office:value="318.825" calcext:value-type="float">
            <text:p>319</text:p>
          </table:table-cell>
          <table:table-cell table:style-name="ce205" table:number-columns-repeated="18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127" office:value-type="string" calcext:value-type="string">
            <text:p>mantenimiento de la pagina web (dominio)</text:p>
          </table:table-cell>
          <table:table-cell table:style-name="ce233" office:value-type="float" office:value="8" calcext:value-type="float">
            <text:p>8.0</text:p>
          </table:table-cell>
          <table:table-cell table:style-name="ce223" office:value-type="float" office:value="1" calcext:value-type="float">
            <text:p>1</text:p>
          </table:table-cell>
          <table:table-cell table:style-name="ce223" table:formula="of:=[.D18]" office:value-type="float" office:value="8" calcext:value-type="float">
            <text:p>8</text:p>
          </table:table-cell>
          <table:table-cell table:style-name="ce223"/>
          <table:table-cell table:style-name="ce288" table:formula="of:=[.F18]+[.G18]" office:value-type="float" office:value="8" calcext:value-type="float">
            <text:p>8</text:p>
          </table:table-cell>
          <table:table-cell table:style-name="ce205" table:number-columns-repeated="5"/>
          <table:table-cell table:style-name="ce230"/>
          <table:table-cell table:style-name="ce205" table:number-columns-repeated="12"/>
          <table:table-cell table:number-columns-repeated="16358"/>
        </table:table-row>
        <table:table-row table:style-name="ro7">
          <table:table-cell table:style-name="ce205" table:number-columns-repeated="2"/>
          <table:table-cell table:style-name="ce269" office:value-type="string" calcext:value-type="string">
            <text:p>Publicidad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" calcext:value-type="float">
            <text:p>1</text:p>
          </table:table-cell>
          <table:table-cell table:style-name="ce277" table:formula="of:=[.D19]" office:value-type="float" office:value="20" calcext:value-type="float">
            <text:p>20</text:p>
          </table:table-cell>
          <table:table-cell table:style-name="ce277"/>
          <table:table-cell table:style-name="ce288" table:formula="of:=[.F19]+[.G19]" office:value-type="float" office:value="20" calcext:value-type="float">
            <text:p>20</text:p>
          </table:table-cell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"/>
          <table:table-cell table:style-name="ce270" office:value-type="string" calcext:value-type="string">
            <text:p>TOTAL GASTOS DE VENTAS</text:p>
          </table:table-cell>
          <table:table-cell table:style-name="ce278" table:formula="of:=SUM([.D17:.D19])" office:value-type="float" office:value="346.825" calcext:value-type="float">
            <text:p>347</text:p>
          </table:table-cell>
          <table:table-cell table:style-name="ce281" office:value-type="float" office:value="1" calcext:value-type="float">
            <text:p>1</text:p>
          </table:table-cell>
          <table:table-cell table:style-name="ce281" table:formula="of:=[.F17]+[.F18]+[.F19]" office:value-type="float" office:value="346.825" calcext:value-type="float">
            <text:p>347</text:p>
          </table:table-cell>
          <table:table-cell table:style-name="ce281" table:formula="of:=SUM([.G17:.G19])" office:value-type="float" office:value="0" calcext:value-type="float">
            <text:p>0</text:p>
          </table:table-cell>
          <table:table-cell table:style-name="ce289" table:formula="of:=[.F20]+[.G20]" office:value-type="float" office:value="346.825" calcext:value-type="float">
            <text:p>347</text:p>
          </table:table-cell>
          <table:table-cell table:style-name="ce205" table:number-columns-repeated="18"/>
          <table:table-cell table:number-columns-repeated="16358"/>
        </table:table-row>
        <table:table-row table:style-name="ro7">
          <table:table-cell table:style-name="ce205" table:number-columns-repeated="2"/>
          <table:table-cell table:style-name="ce271" office:value-type="string" calcext:value-type="string">
            <text:p>TOTAL GASTOS OPERATIVOS</text:p>
          </table:table-cell>
          <table:table-cell table:style-name="ce279" table:formula="of:=[.D15]+[.D20]" office:value-type="float" office:value="1560.2" calcext:value-type="float">
            <text:p>1,560</text:p>
          </table:table-cell>
          <table:table-cell table:style-name="ce279"/>
          <table:table-cell table:style-name="ce279" table:formula="of:=SUM([.F15]+[.F20])" office:value-type="float" office:value="1560.2" calcext:value-type="float">
            <text:p>1,560</text:p>
          </table:table-cell>
          <table:table-cell table:style-name="ce279" table:formula="of:=[.G15]+[.G20]" office:value-type="float" office:value="0" calcext:value-type="float">
            <text:p>0</text:p>
          </table:table-cell>
          <table:table-cell table:style-name="ce290" table:formula="of:=[.H15]+[.H20]" office:value-type="float" office:value="1560.2" calcext:value-type="float">
            <text:p>1560</text:p>
          </table:table-cell>
          <table:table-cell table:style-name="ce229"/>
          <table:table-cell table:style-name="ce205" table:number-columns-repeated="17"/>
          <table:table-cell table:number-columns-repeated="16358"/>
        </table:table-row>
        <table:table-row table:style-name="ro4">
          <table:table-cell table:style-name="ce205" table:number-columns-repeated="2"/>
          <table:table-cell table:style-name="ce272"/>
          <table:table-cell table:style-name="ce280"/>
          <table:table-cell table:style-name="ce229" table:number-columns-repeated="3"/>
          <table:table-cell table:style-name="ce291"/>
          <table:table-cell table:style-name="ce230"/>
          <table:table-cell table:style-name="ce205" table:number-columns-repeated="17"/>
          <table:table-cell table:number-columns-repeated="16358"/>
        </table:table-row>
        <table:table-row table:style-name="ro4" table:number-rows-repeated="932">
          <table:table-cell table:style-name="ce205" table:number-columns-repeated="26"/>
          <table:table-cell table:number-columns-repeated="16358"/>
        </table:table-row>
        <table:table-row table:style-name="ro8" table:number-rows-repeated="104762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g) Costos_Unitarios" table:style-name="ta14">
        <table:table-column table:style-name="co40" table:default-cell-style-name="ce20"/>
        <table:table-column table:style-name="co52" table:default-cell-style-name="ce20"/>
        <table:table-column table:style-name="co53" table:default-cell-style-name="ce20"/>
        <table:table-column table:style-name="co40" table:default-cell-style-name="ce20"/>
        <table:table-column table:style-name="co54" table:default-cell-style-name="ce20"/>
        <table:table-column table:style-name="co32" table:default-cell-style-name="ce20"/>
        <table:table-column table:style-name="co13" table:default-cell-style-name="ce20"/>
        <table:table-column table:style-name="co55" table:default-cell-style-name="ce20"/>
        <table:table-column table:style-name="co13" table:number-columns-repeated="18" table:default-cell-style-name="ce20"/>
        <table:table-column table:style-name="co14" table:number-columns-repeated="16358" table:default-cell-style-name="ce20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style-name="ce22" office:value-type="string" calcext:value-type="string" table:number-columns-spanned="2" table:number-rows-spanned="1">
            <text:p>CUADRO N° 8</text:p>
          </table:table-cell>
          <table:covered-table-cell table:style-name="ce22"/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292" office:value-type="string" calcext:value-type="string" table:number-columns-spanned="2" table:number-rows-spanned="1">
            <text:p>COSTO TOTAL UNITARIO- CTU</text:p>
          </table:table-cell>
          <table:covered-table-cell/>
          <table:table-cell/>
          <table:table-cell table:style-name="ce302" office:value-type="string" calcext:value-type="string" table:number-columns-spanned="2" table:number-rows-spanned="1">
            <text:p>COSTO UNITARIO: LOTE DE 100 UNIDADES/MES</text:p>
          </table:table-cell>
          <table:covered-table-cell table:style-name="ce314"/>
          <table:table-cell table:number-columns-repeated="16378"/>
        </table:table-row>
        <table:table-row table:style-name="ro7">
          <table:table-cell table:number-columns-repeated="4"/>
          <table:table-cell table:style-name="ce82"/>
          <table:table-cell table:style-name="ce315"/>
          <table:table-cell table:number-columns-repeated="16378"/>
        </table:table-row>
        <table:table-row table:style-name="ro7">
          <table:table-cell/>
          <table:table-cell table:style-name="ce293" office:value-type="string" calcext:value-type="string">
            <text:p>CTU = <text:s/>CFU + CVU</text:p>
          </table:table-cell>
          <table:table-cell table:number-columns-repeated="2"/>
          <table:table-cell table:style-name="ce303" office:value-type="string" calcext:value-type="string">
            <text:p>Costo fijo mes</text:p>
          </table:table-cell>
          <table:table-cell table:style-name="ce316" office:value-type="string" calcext:value-type="string">
            <text:p>Doláres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4" office:value-type="string" calcext:value-type="string">
            <text:p>Gastos operativos fijos</text:p>
          </table:table-cell>
          <table:table-cell table:style-name="ce317" table:formula="of:=[$'f) Gastos_Operativos'.F21]" office:value-type="float" office:value="1560.2" calcext:value-type="float">
            <text:p>1560</text:p>
          </table:table-cell>
          <table:table-cell table:number-columns-repeated="16378"/>
        </table:table-row>
        <table:table-row table:style-name="ro4">
          <table:table-cell/>
          <table:table-cell table:style-name="ce82" office:value-type="string" calcext:value-type="string">
            <text:p>Donde:</text:p>
          </table:table-cell>
          <table:table-cell table:number-columns-repeated="2"/>
          <table:table-cell table:style-name="ce304" office:value-type="string" calcext:value-type="string">
            <text:p>Depreciación activo fijo</text:p>
          </table:table-cell>
          <table:table-cell table:style-name="ce317" table:formula="of:=[$'c) Dep. y VR'.F8]/12" office:value-type="float" office:value="89.039039039039" calcext:value-type="float">
            <text:p>89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4" office:value-type="string" calcext:value-type="string">
            <text:p>Amortización de intangibles</text:p>
          </table:table-cell>
          <table:table-cell table:style-name="ce318" table:formula="of:=[$'c) Dep. y VR'.F16]/12" office:value-type="float" office:value="3.37837837837838" calcext:value-type="float">
            <text:p>3.4</text:p>
          </table:table-cell>
          <table:table-cell table:number-columns-repeated="16378"/>
        </table:table-row>
        <table:table-row table:style-name="ro7">
          <table:table-cell/>
          <table:table-cell table:style-name="ce82" office:value-type="string" calcext:value-type="string">
            <text:p>Costo Fijo Unitario (CFU) = <text:s/></text:p>
          </table:table-cell>
          <table:table-cell table:style-name="ce297" office:value-type="string" calcext:value-type="string">
            <text:p>Costo Fijo Total</text:p>
          </table:table-cell>
          <table:table-cell/>
          <table:table-cell table:style-name="ce304"/>
          <table:table-cell table:style-name="ce319"/>
          <table:table-cell table:number-columns-repeated="16378"/>
        </table:table-row>
        <table:table-row table:style-name="ro4">
          <table:table-cell table:number-columns-repeated="2"/>
          <table:table-cell table:style-name="ce298" office:value-type="string" calcext:value-type="string">
            <text:p>N° Unidades Producidas</text:p>
          </table:table-cell>
          <table:table-cell/>
          <table:table-cell table:style-name="ce305" office:value-type="string" calcext:value-type="string">
            <text:p>CIF fijos</text:p>
          </table:table-cell>
          <table:table-cell table:style-name="ce320" table:formula="of:=[$'d) Costos_producción'.F19]" office:value-type="float" office:value="208" calcext:value-type="float">
            <text:p>208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6" office:value-type="string" calcext:value-type="string">
            <text:p>Total Costo Fijo</text:p>
          </table:table-cell>
          <table:table-cell table:style-name="ce321" table:formula="of:=SUM([.F7:.F11])" office:value-type="float" office:value="1860.61741741742" calcext:value-type="float">
            <text:p>1861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7" office:value-type="string" calcext:value-type="string">
            <text:p>Costo variable mes</text:p>
          </table:table-cell>
          <table:table-cell table:style-name="ce322" office:value-type="string" calcext:value-type="string">
            <text:p>Doláres</text:p>
          </table:table-cell>
          <table:table-cell table:number-columns-repeated="16378"/>
        </table:table-row>
        <table:table-row table:style-name="ro7">
          <table:table-cell/>
          <table:table-cell table:style-name="ce82" office:value-type="string" calcext:value-type="string">
            <text:p>Costo Variable Unitario (CFU) = <text:s/></text:p>
          </table:table-cell>
          <table:table-cell table:style-name="ce297" office:value-type="string" calcext:value-type="string">
            <text:p>Costo Variable Total</text:p>
          </table:table-cell>
          <table:table-cell/>
          <table:table-cell table:style-name="ce304" office:value-type="string" calcext:value-type="string">
            <text:p>Materia prima directa</text:p>
          </table:table-cell>
          <table:table-cell table:style-name="ce317" table:formula="of:=[$'d) Costos_producción'.G8]" office:value-type="float" office:value="775.85" calcext:value-type="float">
            <text:p>776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298" office:value-type="string" calcext:value-type="string">
            <text:p>N° Unidades Producidas</text:p>
          </table:table-cell>
          <table:table-cell/>
          <table:table-cell table:style-name="ce304" office:value-type="string" calcext:value-type="string">
            <text:p>Mano de obra directa</text:p>
          </table:table-cell>
          <table:table-cell table:style-name="ce317" table:formula="of:=[$'d) Costos_producción'.D15]*100" office:value-type="float" office:value="834" calcext:value-type="float">
            <text:p>834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4" office:value-type="string" calcext:value-type="string">
            <text:p>CIF variables</text:p>
          </table:table-cell>
          <table:table-cell table:style-name="ce317" table:formula="of:=[$'d) Costos_producción'.G19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305" office:value-type="string" calcext:value-type="string">
            <text:p>Gastos operativos variables</text:p>
          </table:table-cell>
          <table:table-cell table:style-name="ce320" table:formula="of:=[$'f) Gastos_Operativos'.G21]" office:value-type="float" office:value="0" calcext:value-type="float">
            <text:p>0</text:p>
          </table:table-cell>
          <table:table-cell table:number-columns-repeated="16378"/>
        </table:table-row>
        <table:table-row table:style-name="ro7">
          <table:table-cell/>
          <table:table-cell table:style-name="ce292" table:number-columns-spanned="2" table:number-rows-spanned="1"/>
          <table:covered-table-cell/>
          <table:table-cell/>
          <table:table-cell table:style-name="ce308" office:value-type="string" calcext:value-type="string">
            <text:p>Total Costo Variable</text:p>
          </table:table-cell>
          <table:table-cell table:style-name="ce323" table:formula="of:=SUM([.F14:.F17])" office:value-type="float" office:value="1609.85" calcext:value-type="float">
            <text:p>1610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294"/>
          <table:table-cell table:style-name="ce299"/>
          <table:table-cell table:style-name="ce295"/>
          <table:table-cell table:style-name="ce309" office:value-type="string" calcext:value-type="string">
            <text:p>Costos Unitarios</text:p>
          </table:table-cell>
          <table:table-cell table:style-name="ce324" office:value-type="string" calcext:value-type="string">
            <text:p>Doláres</text:p>
          </table:table-cell>
          <table:table-cell table:number-columns-repeated="16378"/>
        </table:table-row>
        <table:table-row table:style-name="ro4">
          <table:table-cell/>
          <table:table-cell table:style-name="ce295" table:number-columns-repeated="3"/>
          <table:table-cell table:style-name="ce310" office:value-type="string" calcext:value-type="string">
            <text:p>Nº de Unidades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16378"/>
        </table:table-row>
        <table:table-row table:style-name="ro4">
          <table:table-cell/>
          <table:table-cell table:style-name="ce296"/>
          <table:table-cell table:style-name="ce295" table:number-columns-repeated="2"/>
          <table:table-cell table:style-name="ce304" office:value-type="string" calcext:value-type="string">
            <text:p>Costo fijo unitario,CFU (170)</text:p>
          </table:table-cell>
          <table:table-cell table:style-name="ce319" table:formula="of:=[.F12]/150" office:value-type="float" office:value="12.4041161161161" calcext:value-type="float">
            <text:p>12.40</text:p>
          </table:table-cell>
          <table:table-cell/>
          <table:table-cell office:value-type="string" calcext:value-type="string">
            <text:p>Precio de venta</text:p>
          </table:table-cell>
          <table:table-cell office:value-type="float" office:value="28.5" calcext:value-type="float">
            <text:p>28.5</text:p>
          </table:table-cell>
          <table:table-cell table:number-columns-repeated="16375"/>
        </table:table-row>
        <table:table-row table:style-name="ro4">
          <table:table-cell/>
          <table:table-cell table:style-name="ce243"/>
          <table:table-cell table:style-name="ce299" table:number-columns-repeated="2"/>
          <table:table-cell table:style-name="ce304" office:value-type="string" calcext:value-type="string">
            <text:p>Costo variable unitario, CVU</text:p>
          </table:table-cell>
          <table:table-cell table:style-name="ce326" table:formula="of:=[.F18]/[.F21]" office:value-type="float" office:value="16.0985" calcext:value-type="float">
            <text:p>16.10</text:p>
          </table:table-cell>
          <table:table-cell/>
          <table:table-cell office:value-type="string" calcext:value-type="string">
            <text:p>CTU</text:p>
          </table:table-cell>
          <table:table-cell table:style-name="ce301" table:formula="of:=[.F24]" office:value-type="float" office:value="28.5026161161161" calcext:value-type="float">
            <text:p>28.5</text:p>
          </table:table-cell>
          <table:table-cell table:number-columns-repeated="16375"/>
        </table:table-row>
        <table:table-row table:style-name="ro7">
          <table:table-cell/>
          <table:table-cell table:style-name="ce295" table:number-columns-repeated="3"/>
          <table:table-cell table:style-name="ce311" office:value-type="string" calcext:value-type="string">
            <text:p>Costo total unitario, CTU</text:p>
          </table:table-cell>
          <table:table-cell table:style-name="ce327" table:formula="of:=[.F22]+[.F23]" office:value-type="float" office:value="28.5026161161161" calcext:value-type="float">
            <text:p>28.5</text:p>
          </table:table-cell>
          <table:table-cell/>
          <table:table-cell office:value-type="string" calcext:value-type="string">
            <text:p>Margen</text:p>
          </table:table-cell>
          <table:table-cell table:style-name="ce301" table:formula="of:=[.I22]-[.I23]" office:value-type="float" office:value="-0.00261611611611556" calcext:value-type="float">
            <text:p>0.0</text:p>
          </table:table-cell>
          <table:table-cell table:number-columns-repeated="16375"/>
        </table:table-row>
        <table:table-row table:style-name="ro4">
          <table:table-cell/>
          <table:table-cell table:style-name="ce296"/>
          <table:table-cell table:style-name="ce295" table:number-columns-repeated="2"/>
          <table:table-cell table:number-columns-repeated="16380"/>
        </table:table-row>
        <table:table-row table:style-name="ro4">
          <table:table-cell/>
          <table:table-cell table:style-name="ce243"/>
          <table:table-cell table:style-name="ce295" table:number-columns-repeated="2"/>
          <table:table-cell table:style-name="ce312"/>
          <table:table-cell/>
          <table:table-cell table:style-name="ce312"/>
          <table:table-cell table:number-columns-repeated="16377"/>
        </table:table-row>
        <table:table-row table:style-name="ro4">
          <table:table-cell/>
          <table:table-cell table:style-name="ce243"/>
          <table:table-cell table:style-name="ce295" table:number-columns-repeated="2"/>
          <table:table-cell table:number-columns-repeated="16380"/>
        </table:table-row>
        <table:table-row table:style-name="ro4">
          <table:table-cell/>
          <table:table-cell table:style-name="ce243"/>
          <table:table-cell table:style-name="ce295" table:number-columns-repeated="4"/>
          <table:table-cell table:number-columns-repeated="16378"/>
        </table:table-row>
        <table:table-row table:style-name="ro4">
          <table:table-cell/>
          <table:table-cell table:style-name="ce295" table:number-columns-repeated="5"/>
          <table:table-cell table:number-columns-repeated="16378"/>
        </table:table-row>
        <table:table-row table:style-name="ro4">
          <table:table-cell/>
          <table:table-cell table:style-name="ce295" table:number-columns-repeated="2"/>
          <table:table-cell table:style-name="ce299"/>
          <table:table-cell table:style-name="ce295" table:number-columns-repeated="2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299"/>
          <table:table-cell table:style-name="ce295" table:number-columns-repeated="3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300"/>
          <table:table-cell table:style-name="ce295" table:number-columns-repeated="3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299"/>
          <table:table-cell table:style-name="ce295" table:number-columns-repeated="2"/>
          <table:table-cell table:style-name="ce313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300"/>
          <table:table-cell table:style-name="ce295" table:number-columns-repeated="3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300"/>
          <table:table-cell table:style-name="ce295"/>
          <table:table-cell table:style-name="ce299"/>
          <table:table-cell table:style-name="ce295"/>
          <table:table-cell table:number-columns-repeated="16378"/>
        </table:table-row>
        <table:table-row table:style-name="ro4">
          <table:table-cell/>
          <table:table-cell table:style-name="ce295"/>
          <table:table-cell table:style-name="ce299"/>
          <table:table-cell table:style-name="ce295"/>
          <table:table-cell table:style-name="ce313"/>
          <table:table-cell table:number-columns-repeated="16379"/>
        </table:table-row>
        <table:table-row table:style-name="ro4">
          <table:table-cell/>
          <table:table-cell table:style-name="ce295" table:number-columns-repeated="3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301"/>
          <table:table-cell table:number-columns-repeated="16381"/>
        </table:table-row>
        <table:table-row table:style-name="ro4" table:number-rows-repeated="963">
          <table:table-cell table:number-columns-repeated="16384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h) Capital_Trabajo" table:style-name="ta15">
        <table:table-column table:style-name="co13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6" table:number-columns-repeated="3" table:default-cell-style-name="Default"/>
        <table:table-column table:style-name="co31" table:default-cell-style-name="Default"/>
        <table:table-column table:style-name="co57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6" table:default-cell-style-name="Default"/>
        <table:table-column table:style-name="co13" table:number-columns-repeated="3" table:default-cell-style-name="Default"/>
        <table:table-column table:style-name="co14" table:number-columns-repeated="16365" table:default-cell-style-name="Default"/>
        <table:table-row table:style-name="ro4">
          <table:table-cell table:number-columns-repeated="16"/>
          <table:table-cell>
            <draw:custom-shape table:end-cell-address="'h) Capital_Trabajo'.U6" table:end-x="0.766cm" table:end-y="0.104cm" draw:z-index="0" draw:name="Rectángulo redondeado 1" draw:style-name="gr2" draw:text-style-name="P3" svg:width="7.884cm" svg:height="2.168cm" svg:x="15.151cm" svg:y="0.37cm">
              <text:p text:style-name="P2"><text:span text:style-name="T1">Nuestro capital de trabajo se incrementa cada año, ya que nuestas cantidades producidas tambien aumentan año en año.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6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92" office:value-type="string" calcext:value-type="string" table:number-columns-spanned="15" table:number-rows-spanned="1">
            <text:p>CUADRO N° 9</text:p>
          </table:table-cell>
          <table:covered-table-cell table:number-columns-repeated="14" table:style-name="ce103"/>
          <table:table-cell table:number-columns-repeated="16368"/>
        </table:table-row>
        <table:table-row table:style-name="ro4">
          <table:table-cell/>
          <table:table-cell table:style-name="ce93" table:number-columns-repeated="15"/>
          <table:table-cell table:number-columns-repeated="16368"/>
        </table:table-row>
        <table:table-row table:style-name="ro4">
          <table:table-cell/>
          <table:table-cell table:style-name="ce92" office:value-type="string" calcext:value-type="string" table:number-columns-spanned="15" table:number-rows-spanned="1">
            <text:p>VARIACION DE CAPITAL DE TRABAJO AÑO 1 (12 MESES)</text:p>
          </table:table-cell>
          <table:covered-table-cell table:number-columns-repeated="14" table:style-name="ce103"/>
          <table:table-cell table:number-columns-repeated="16368"/>
        </table:table-row>
        <table:table-row table:style-name="ro7">
          <table:table-cell/>
          <table:table-cell table:style-name="ce93" table:number-columns-repeated="15"/>
          <table:table-cell table:number-columns-repeated="16368"/>
        </table:table-row>
        <table:table-row table:style-name="ro4">
          <table:table-cell/>
          <table:table-cell table:style-name="ce328" office:value-type="string" calcext:value-type="string" table:number-columns-spanned="1" table:number-rows-spanned="2">
            <text:p>RUBRO</text:p>
          </table:table-cell>
          <table:table-cell table:style-name="ce332" office:value-type="float" office:value="0" calcext:value-type="float" table:number-columns-spanned="1" table:number-rows-spanned="2">
            <text:p>0</text:p>
          </table:table-cell>
          <table:table-cell table:style-name="ce332" office:value-type="string" calcext:value-type="string" table:number-columns-spanned="12" table:number-rows-spanned="1">
            <text:p>MES</text:p>
          </table:table-cell>
          <table:covered-table-cell table:number-columns-repeated="10" table:style-name="ce338"/>
          <table:covered-table-cell table:style-name="ce339"/>
          <table:table-cell table:style-name="ce340" office:value-type="string" calcext:value-type="string" table:number-columns-spanned="1" table:number-rows-spanned="2">
            <text:p>TOTAL Año 1</text:p>
          </table:table-cell>
          <table:table-cell table:number-columns-repeated="16368"/>
        </table:table-row>
        <table:table-row table:style-name="ro4">
          <table:table-cell/>
          <table:covered-table-cell table:style-name="ce329"/>
          <table:covered-table-cell table:style-name="ce333"/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5" calcext:value-type="float">
            <text:p>5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7" calcext:value-type="float">
            <text:p>7</text:p>
          </table:table-cell>
          <table:table-cell table:style-name="ce337" office:value-type="float" office:value="8" calcext:value-type="float">
            <text:p>8</text:p>
          </table:table-cell>
          <table:table-cell table:style-name="ce337" office:value-type="float" office:value="9" calcext:value-type="float">
            <text:p>9</text:p>
          </table:table-cell>
          <table:table-cell table:style-name="ce337" office:value-type="float" office:value="10" calcext:value-type="float">
            <text:p>10</text:p>
          </table:table-cell>
          <table:table-cell table:style-name="ce337" office:value-type="float" office:value="11" calcext:value-type="float">
            <text:p>11</text:p>
          </table:table-cell>
          <table:table-cell table:style-name="ce337" office:value-type="float" office:value="12" calcext:value-type="float">
            <text:p>12</text:p>
          </table:table-cell>
          <table:covered-table-cell table:style-name="ce341"/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Unidades</text:p>
          </table:table-cell>
          <table:table-cell table:style-name="ce190"/>
          <table:table-cell table:style-name="ce106" table:formula="of:=[$'a) Presupuesto_Ventas'.C7]" office:value-type="float" office:value="100" calcext:value-type="float">
            <text:p>100</text:p>
          </table:table-cell>
          <table:table-cell table:style-name="ce106" table:formula="of:=[$'a) Presupuesto_Ventas'.D7]" office:value-type="float" office:value="95" calcext:value-type="float">
            <text:p>95</text:p>
          </table:table-cell>
          <table:table-cell table:style-name="ce106" table:formula="of:=[$'a) Presupuesto_Ventas'.E7]" office:value-type="float" office:value="95" calcext:value-type="float">
            <text:p>95</text:p>
          </table:table-cell>
          <table:table-cell table:style-name="ce106" table:formula="of:=[$'a) Presupuesto_Ventas'.F7]" office:value-type="float" office:value="110" calcext:value-type="float">
            <text:p>110</text:p>
          </table:table-cell>
          <table:table-cell table:style-name="ce106" table:formula="of:=[$'a) Presupuesto_Ventas'.G7]" office:value-type="float" office:value="110" calcext:value-type="float">
            <text:p>110</text:p>
          </table:table-cell>
          <table:table-cell table:style-name="ce106" table:formula="of:=[$'a) Presupuesto_Ventas'.H7]" office:value-type="float" office:value="110" calcext:value-type="float">
            <text:p>110</text:p>
          </table:table-cell>
          <table:table-cell table:style-name="ce106" table:formula="of:=[$'a) Presupuesto_Ventas'.I7]" office:value-type="float" office:value="100" calcext:value-type="float">
            <text:p>100</text:p>
          </table:table-cell>
          <table:table-cell table:style-name="ce106" table:formula="of:=[$'a) Presupuesto_Ventas'.J7]" office:value-type="float" office:value="95" calcext:value-type="float">
            <text:p>95</text:p>
          </table:table-cell>
          <table:table-cell table:style-name="ce106" table:formula="of:=[$'a) Presupuesto_Ventas'.K7]" office:value-type="float" office:value="110" calcext:value-type="float">
            <text:p>110</text:p>
          </table:table-cell>
          <table:table-cell table:style-name="ce106" table:formula="of:=[$'a) Presupuesto_Ventas'.L7]" office:value-type="float" office:value="120" calcext:value-type="float">
            <text:p>120</text:p>
          </table:table-cell>
          <table:table-cell table:style-name="ce106" table:formula="of:=[$'a) Presupuesto_Ventas'.M7]" office:value-type="float" office:value="120" calcext:value-type="float">
            <text:p>120</text:p>
          </table:table-cell>
          <table:table-cell table:style-name="ce106" table:formula="of:=[$'a) Presupuesto_Ventas'.N7]" office:value-type="float" office:value="110" calcext:value-type="float">
            <text:p>110</text:p>
          </table:table-cell>
          <table:table-cell table:style-name="ce342" table:formula="of:=SUM([.D9:.O9])" office:value-type="float" office:value="1275" calcext:value-type="float">
            <text:p>1,275</text:p>
          </table:table-cell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CV Unitario</text:p>
          </table:table-cell>
          <table:table-cell table:style-name="ce190"/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343"/>
          <table:table-cell table:number-columns-repeated="16368"/>
        </table:table-row>
        <table:table-row table:style-name="ro6">
          <table:table-cell/>
          <table:table-cell table:style-name="ce171" office:value-type="string" calcext:value-type="string">
            <text:p>KW requerido</text:p>
          </table:table-cell>
          <table:table-cell table:style-name="ce334"/>
          <table:table-cell table:style-name="ce190" table:formula="of:=[.D9]*[.D10]" office:value-type="float" office:value="1609.85" calcext:value-type="float">
            <text:p>1609.85</text:p>
          </table:table-cell>
          <table:table-cell table:style-name="ce190" table:formula="of:=[.E9]*[.E10]" office:value-type="float" office:value="1529.3575" calcext:value-type="float">
            <text:p>1529.3575</text:p>
          </table:table-cell>
          <table:table-cell table:style-name="ce190" table:formula="of:=[.F9]*[.F10]" office:value-type="float" office:value="1529.3575" calcext:value-type="float">
            <text:p>1529.3575</text:p>
          </table:table-cell>
          <table:table-cell table:style-name="ce190" table:formula="of:=[.G9]*[.G10]" office:value-type="float" office:value="1770.835" calcext:value-type="float">
            <text:p>1770.835</text:p>
          </table:table-cell>
          <table:table-cell table:style-name="ce334" table:formula="of:=[.H9]*[.H10]" office:value-type="float" office:value="1770.835" calcext:value-type="float">
            <text:p>1771</text:p>
          </table:table-cell>
          <table:table-cell table:style-name="ce190" table:formula="of:=[.I9]*[.I10]" office:value-type="float" office:value="1770.835" calcext:value-type="float">
            <text:p>1770.835</text:p>
          </table:table-cell>
          <table:table-cell table:style-name="ce190" table:formula="of:=[.J9]*[.J10]" office:value-type="float" office:value="1609.85" calcext:value-type="float">
            <text:p>1609.85</text:p>
          </table:table-cell>
          <table:table-cell table:style-name="ce334" table:formula="of:=[.K9]*[.K10]" office:value-type="float" office:value="1529.3575" calcext:value-type="float">
            <text:p>1529</text:p>
          </table:table-cell>
          <table:table-cell table:style-name="ce190" table:formula="of:=[.L9]*[.L10]" office:value-type="float" office:value="1770.835" calcext:value-type="float">
            <text:p>1770.835</text:p>
          </table:table-cell>
          <table:table-cell table:style-name="ce334" table:formula="of:=[.M9]*[.M10]" office:value-type="float" office:value="1931.82" calcext:value-type="float">
            <text:p>1932</text:p>
          </table:table-cell>
          <table:table-cell table:style-name="ce190" table:formula="of:=[.N9]*[.N10]" office:value-type="float" office:value="1931.82" calcext:value-type="float">
            <text:p>1931.82</text:p>
          </table:table-cell>
          <table:table-cell table:style-name="ce190" table:formula="of:=[.O9]*[.O10]" office:value-type="float" office:value="1770.835" calcext:value-type="float">
            <text:p>1770.835</text:p>
          </table:table-cell>
          <table:table-cell table:style-name="ce343"/>
          <table:table-cell table:number-columns-repeated="16368"/>
        </table:table-row>
        <table:table-row table:style-name="ro4">
          <table:table-cell/>
          <table:table-cell table:style-name="ce331" office:value-type="string" calcext:value-type="string">
            <text:p>Variacion KW</text:p>
          </table:table-cell>
          <table:table-cell table:style-name="ce335" table:formula="of:=[.D11]" office:value-type="float" office:value="1609.85" calcext:value-type="float">
            <text:p>1609.85</text:p>
          </table:table-cell>
          <table:table-cell table:style-name="ce336" table:formula="of:=[.E11]-[.D11]" office:value-type="float" office:value="-80.4924999999998" calcext:value-type="float">
            <text:p>-80</text:p>
          </table:table-cell>
          <table:table-cell table:style-name="ce336" table:formula="of:=[.F11]-[.E11]" office:value-type="float" office:value="0" calcext:value-type="float">
            <text:p>0</text:p>
          </table:table-cell>
          <table:table-cell table:style-name="ce336" table:formula="of:=[.G11]-[.F11]" office:value-type="float" office:value="241.4775" calcext:value-type="float">
            <text:p>241</text:p>
          </table:table-cell>
          <table:table-cell table:style-name="ce336" table:formula="of:=[.H11]-[.G11]" office:value-type="float" office:value="0" calcext:value-type="float">
            <text:p>0</text:p>
          </table:table-cell>
          <table:table-cell table:style-name="ce336" table:formula="of:=[.I11]-[.H11]" office:value-type="float" office:value="0" calcext:value-type="float">
            <text:p>0</text:p>
          </table:table-cell>
          <table:table-cell table:style-name="ce336" table:formula="of:=[.J11]-[.I11]" office:value-type="float" office:value="-160.985" calcext:value-type="float">
            <text:p>-161</text:p>
          </table:table-cell>
          <table:table-cell table:style-name="ce336" table:formula="of:=[.K11]-[.J11]" office:value-type="float" office:value="-80.4924999999998" calcext:value-type="float">
            <text:p>-80</text:p>
          </table:table-cell>
          <table:table-cell table:style-name="ce336" table:formula="of:=[.L11]-[.K11]" office:value-type="float" office:value="241.4775" calcext:value-type="float">
            <text:p>241</text:p>
          </table:table-cell>
          <table:table-cell table:style-name="ce336" table:formula="of:=[.M11]-[.L11]" office:value-type="float" office:value="160.985" calcext:value-type="float">
            <text:p>161</text:p>
          </table:table-cell>
          <table:table-cell table:style-name="ce336" table:formula="of:=[.N11]-[.M11]" office:value-type="float" office:value="0" calcext:value-type="float">
            <text:p>0</text:p>
          </table:table-cell>
          <table:table-cell table:style-name="ce336" table:formula="of:=[.O11]-[.N11]" office:value-type="float" office:value="-160.985" calcext:value-type="float">
            <text:p>-161</text:p>
          </table:table-cell>
          <table:table-cell table:style-name="ce336"/>
          <table:table-cell table:style-name="ce344" table:formula="of:=SUM([.C12:.O12])" office:value-type="float" office:value="1770.835" calcext:value-type="float">
            <text:p>1771</text:p>
          </table:table-cell>
          <table:table-cell office:value-type="string" calcext:value-type="string">
            <text:p>dispone al final e inicio del proximo año</text:p>
          </table:table-cell>
          <table:table-cell table:number-columns-repeated="16367"/>
        </table:table-row>
        <table:table-row table:style-name="ro4">
          <table:table-cell table:number-columns-repeated="15"/>
          <table:table-cell office:value-type="string" calcext:value-type="string">
            <text:p>Inversión permanente</text:p>
          </table:table-cell>
          <table:table-cell table:number-columns-repeated="1636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92" office:value-type="string" calcext:value-type="string" table:number-columns-spanned="15" table:number-rows-spanned="1">
            <text:p>VARIACION DE CAPITAL DE TRABAJO AÑO 2 (12 MESES)</text:p>
          </table:table-cell>
          <table:covered-table-cell table:number-columns-repeated="14" table:style-name="ce103"/>
          <table:table-cell table:number-columns-repeated="16368"/>
        </table:table-row>
        <table:table-row table:style-name="ro4">
          <table:table-cell/>
          <table:table-cell table:style-name="ce93" table:number-columns-repeated="15"/>
          <table:table-cell table:number-columns-repeated="16368"/>
        </table:table-row>
        <table:table-row table:style-name="ro4">
          <table:table-cell/>
          <table:table-cell table:style-name="ce328" office:value-type="string" calcext:value-type="string" table:number-columns-spanned="1" table:number-rows-spanned="2">
            <text:p>RUBRO</text:p>
          </table:table-cell>
          <table:table-cell table:style-name="ce332" office:value-type="float" office:value="0" calcext:value-type="float" table:number-columns-spanned="1" table:number-rows-spanned="2">
            <text:p>0</text:p>
          </table:table-cell>
          <table:table-cell table:style-name="ce332" office:value-type="string" calcext:value-type="string" table:number-columns-spanned="12" table:number-rows-spanned="1">
            <text:p>MES</text:p>
          </table:table-cell>
          <table:covered-table-cell table:number-columns-repeated="10" table:style-name="ce338"/>
          <table:covered-table-cell table:style-name="ce339"/>
          <table:table-cell table:style-name="ce340" office:value-type="string" calcext:value-type="string" table:number-columns-spanned="1" table:number-rows-spanned="2">
            <text:p>TOTAL Año 2</text:p>
          </table:table-cell>
          <table:table-cell table:number-columns-repeated="16368"/>
        </table:table-row>
        <table:table-row table:style-name="ro4">
          <table:table-cell/>
          <table:covered-table-cell table:style-name="ce329"/>
          <table:covered-table-cell table:style-name="ce333"/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5" calcext:value-type="float">
            <text:p>5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7" calcext:value-type="float">
            <text:p>7</text:p>
          </table:table-cell>
          <table:table-cell table:style-name="ce337" office:value-type="float" office:value="8" calcext:value-type="float">
            <text:p>8</text:p>
          </table:table-cell>
          <table:table-cell table:style-name="ce337" office:value-type="float" office:value="9" calcext:value-type="float">
            <text:p>9</text:p>
          </table:table-cell>
          <table:table-cell table:style-name="ce337" office:value-type="float" office:value="10" calcext:value-type="float">
            <text:p>10</text:p>
          </table:table-cell>
          <table:table-cell table:style-name="ce337" office:value-type="float" office:value="11" calcext:value-type="float">
            <text:p>11</text:p>
          </table:table-cell>
          <table:table-cell table:style-name="ce337" office:value-type="float" office:value="12" calcext:value-type="float">
            <text:p>12</text:p>
          </table:table-cell>
          <table:covered-table-cell table:style-name="ce341"/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Unidades</text:p>
          </table:table-cell>
          <table:table-cell table:style-name="ce190"/>
          <table:table-cell table:style-name="ce106" table:formula="of:=[$'a) Presupuesto_Ventas'.C8]" office:value-type="float" office:value="110" calcext:value-type="float">
            <text:p>110</text:p>
          </table:table-cell>
          <table:table-cell table:style-name="ce106" table:formula="of:=[$'a) Presupuesto_Ventas'.D8]" office:value-type="float" office:value="120" calcext:value-type="float">
            <text:p>120</text:p>
          </table:table-cell>
          <table:table-cell table:style-name="ce106" table:formula="of:=[$'a) Presupuesto_Ventas'.E8]" office:value-type="float" office:value="110" calcext:value-type="float">
            <text:p>110</text:p>
          </table:table-cell>
          <table:table-cell table:style-name="ce106" table:formula="of:=[$'a) Presupuesto_Ventas'.F8]" office:value-type="float" office:value="120" calcext:value-type="float">
            <text:p>120</text:p>
          </table:table-cell>
          <table:table-cell table:style-name="ce106" table:formula="of:=[$'a) Presupuesto_Ventas'.G8]" office:value-type="float" office:value="110" calcext:value-type="float">
            <text:p>110</text:p>
          </table:table-cell>
          <table:table-cell table:style-name="ce106" table:formula="of:=[$'a) Presupuesto_Ventas'.H8]" office:value-type="float" office:value="110" calcext:value-type="float">
            <text:p>110</text:p>
          </table:table-cell>
          <table:table-cell table:style-name="ce106" table:formula="of:=[$'a) Presupuesto_Ventas'.I8]" office:value-type="float" office:value="120" calcext:value-type="float">
            <text:p>120</text:p>
          </table:table-cell>
          <table:table-cell table:style-name="ce106" table:formula="of:=[$'a) Presupuesto_Ventas'.J8]" office:value-type="float" office:value="120" calcext:value-type="float">
            <text:p>120</text:p>
          </table:table-cell>
          <table:table-cell table:style-name="ce106" table:formula="of:=[$'a) Presupuesto_Ventas'.K8]" office:value-type="float" office:value="120" calcext:value-type="float">
            <text:p>120</text:p>
          </table:table-cell>
          <table:table-cell table:style-name="ce106" table:formula="of:=[$'a) Presupuesto_Ventas'.L8]" office:value-type="float" office:value="120" calcext:value-type="float">
            <text:p>120</text:p>
          </table:table-cell>
          <table:table-cell table:style-name="ce106" table:formula="of:=[$'a) Presupuesto_Ventas'.M8]" office:value-type="float" office:value="130" calcext:value-type="float">
            <text:p>130</text:p>
          </table:table-cell>
          <table:table-cell table:style-name="ce106" table:formula="of:=[$'a) Presupuesto_Ventas'.N8]" office:value-type="float" office:value="140" calcext:value-type="float">
            <text:p>140</text:p>
          </table:table-cell>
          <table:table-cell table:style-name="ce342" table:formula="of:=SUM([.D19:.O19])" office:value-type="float" office:value="1430" calcext:value-type="float">
            <text:p>1,430</text:p>
          </table:table-cell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CV Unitario</text:p>
          </table:table-cell>
          <table:table-cell table:style-name="ce190"/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343"/>
          <table:table-cell table:number-columns-repeated="16368"/>
        </table:table-row>
        <table:table-row table:style-name="ro4">
          <table:table-cell/>
          <table:table-cell table:style-name="ce171" office:value-type="string" calcext:value-type="string">
            <text:p>KW Requerido</text:p>
          </table:table-cell>
          <table:table-cell table:style-name="ce334"/>
          <table:table-cell table:style-name="ce334" table:formula="of:=[.D19]*[.D20]" office:value-type="float" office:value="1770.835" calcext:value-type="float">
            <text:p>1771</text:p>
          </table:table-cell>
          <table:table-cell table:style-name="ce190" table:formula="of:=[.E19]*[.E20]" office:value-type="float" office:value="1931.82" calcext:value-type="float">
            <text:p>1931.82</text:p>
          </table:table-cell>
          <table:table-cell table:style-name="ce190" table:formula="of:=[.F19]*[.F20]" office:value-type="float" office:value="1770.835" calcext:value-type="float">
            <text:p>1770.835</text:p>
          </table:table-cell>
          <table:table-cell table:style-name="ce190" table:formula="of:=[.G19]*[.G20]" office:value-type="float" office:value="1931.82" calcext:value-type="float">
            <text:p>1931.82</text:p>
          </table:table-cell>
          <table:table-cell table:style-name="ce334" table:formula="of:=[.H19]*[.H20]" office:value-type="float" office:value="1770.835" calcext:value-type="float">
            <text:p>1771</text:p>
          </table:table-cell>
          <table:table-cell table:style-name="ce190" table:formula="of:=[.I19]*[.I20]" office:value-type="float" office:value="1770.835" calcext:value-type="float">
            <text:p>1770.835</text:p>
          </table:table-cell>
          <table:table-cell table:style-name="ce190" table:formula="of:=[.J19]*[.J20]" office:value-type="float" office:value="1931.82" calcext:value-type="float">
            <text:p>1931.82</text:p>
          </table:table-cell>
          <table:table-cell table:style-name="ce334" table:formula="of:=[.K19]*[.K20]" office:value-type="float" office:value="1931.82" calcext:value-type="float">
            <text:p>1932</text:p>
          </table:table-cell>
          <table:table-cell table:style-name="ce190" table:formula="of:=[.L19]*[.L20]" office:value-type="float" office:value="1931.82" calcext:value-type="float">
            <text:p>1931.82</text:p>
          </table:table-cell>
          <table:table-cell table:style-name="ce334" table:formula="of:=[.M19]*[.M20]" office:value-type="float" office:value="1931.82" calcext:value-type="float">
            <text:p>1932</text:p>
          </table:table-cell>
          <table:table-cell table:style-name="ce334" table:formula="of:=[.N19]*[.N20]" office:value-type="float" office:value="2092.805" calcext:value-type="float">
            <text:p>2093</text:p>
          </table:table-cell>
          <table:table-cell table:style-name="ce334" table:formula="of:=[.O19]*[.O20]" office:value-type="float" office:value="2253.79" calcext:value-type="float">
            <text:p>2254</text:p>
          </table:table-cell>
          <table:table-cell table:style-name="ce343"/>
          <table:table-cell table:number-columns-repeated="16368"/>
        </table:table-row>
        <table:table-row table:style-name="ro4">
          <table:table-cell/>
          <table:table-cell table:style-name="ce331" office:value-type="string" calcext:value-type="string">
            <text:p>Variacion KW</text:p>
          </table:table-cell>
          <table:table-cell table:style-name="ce336" table:formula="of:=[.D21]" office:value-type="float" office:value="1770.835" calcext:value-type="float">
            <text:p>1771</text:p>
          </table:table-cell>
          <table:table-cell table:style-name="ce336" table:formula="of:=[.E21]-[.D21]" office:value-type="float" office:value="160.985" calcext:value-type="float">
            <text:p>161</text:p>
          </table:table-cell>
          <table:table-cell table:style-name="ce336" table:formula="of:=[.F21]-[.E21]" office:value-type="float" office:value="-160.985" calcext:value-type="float">
            <text:p>-161</text:p>
          </table:table-cell>
          <table:table-cell table:style-name="ce336" table:formula="of:=[.G21]-[.F21]" office:value-type="float" office:value="160.985" calcext:value-type="float">
            <text:p>161</text:p>
          </table:table-cell>
          <table:table-cell table:style-name="ce336" table:formula="of:=[.H21]-[.G21]" office:value-type="float" office:value="-160.985" calcext:value-type="float">
            <text:p>-161</text:p>
          </table:table-cell>
          <table:table-cell table:style-name="ce336" table:formula="of:=[.I21]-[.H21]" office:value-type="float" office:value="0" calcext:value-type="float">
            <text:p>0</text:p>
          </table:table-cell>
          <table:table-cell table:style-name="ce336" table:formula="of:=[.J21]-[.I21]" office:value-type="float" office:value="160.985" calcext:value-type="float">
            <text:p>161</text:p>
          </table:table-cell>
          <table:table-cell table:style-name="ce336" table:formula="of:=[.K21]-[.J21]" office:value-type="float" office:value="0" calcext:value-type="float">
            <text:p>0</text:p>
          </table:table-cell>
          <table:table-cell table:style-name="ce336" table:formula="of:=[.L21]-[.K21]" office:value-type="float" office:value="0" calcext:value-type="float">
            <text:p>0</text:p>
          </table:table-cell>
          <table:table-cell table:style-name="ce336" table:formula="of:=[.M21]-[.L21]" office:value-type="float" office:value="0" calcext:value-type="float">
            <text:p>0</text:p>
          </table:table-cell>
          <table:table-cell table:style-name="ce336" table:formula="of:=[.N21]-[.M21]" office:value-type="float" office:value="160.985" calcext:value-type="float">
            <text:p>161</text:p>
          </table:table-cell>
          <table:table-cell table:style-name="ce336" table:formula="of:=[.O21]-[.N21]" office:value-type="float" office:value="160.985" calcext:value-type="float">
            <text:p>161</text:p>
          </table:table-cell>
          <table:table-cell table:style-name="ce336"/>
          <table:table-cell table:style-name="ce345" table:formula="of:=SUM([.D22:.O22])" office:value-type="float" office:value="482.955" calcext:value-type="float">
            <text:p>483</text:p>
          </table:table-cell>
          <table:table-cell table:style-name="ce346" office:value-type="string" calcext:value-type="string">
            <text:p>Van al flujo de caja en el año 1</text:p>
          </table:table-cell>
          <table:table-cell table:style-name="ce347"/>
          <table:table-cell table:number-columns-repeated="16366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 table:style-name="ce92" office:value-type="string" calcext:value-type="string" table:number-columns-spanned="15" table:number-rows-spanned="1">
            <text:p>VARIACION DE CAPITAL DE TRABAJO AÑO 3 (12 MESES)</text:p>
          </table:table-cell>
          <table:covered-table-cell table:number-columns-repeated="14" table:style-name="ce103"/>
          <table:table-cell table:number-columns-repeated="16368"/>
        </table:table-row>
        <table:table-row table:style-name="ro4">
          <table:table-cell/>
          <table:table-cell table:style-name="ce93" table:number-columns-repeated="15"/>
          <table:table-cell table:number-columns-repeated="16368"/>
        </table:table-row>
        <table:table-row table:style-name="ro4">
          <table:table-cell/>
          <table:table-cell table:style-name="ce328" office:value-type="string" calcext:value-type="string" table:number-columns-spanned="1" table:number-rows-spanned="2">
            <text:p>RUBRO</text:p>
          </table:table-cell>
          <table:table-cell table:style-name="ce332" office:value-type="float" office:value="0" calcext:value-type="float" table:number-columns-spanned="1" table:number-rows-spanned="2">
            <text:p>0</text:p>
          </table:table-cell>
          <table:table-cell table:style-name="ce332" office:value-type="string" calcext:value-type="string" table:number-columns-spanned="12" table:number-rows-spanned="1">
            <text:p>MES</text:p>
          </table:table-cell>
          <table:covered-table-cell table:number-columns-repeated="10" table:style-name="ce338"/>
          <table:covered-table-cell table:style-name="ce339"/>
          <table:table-cell table:style-name="ce340" office:value-type="string" calcext:value-type="string" table:number-columns-spanned="1" table:number-rows-spanned="2">
            <text:p>TOTAL Año 3</text:p>
          </table:table-cell>
          <table:table-cell table:number-columns-repeated="16368"/>
        </table:table-row>
        <table:table-row table:style-name="ro4">
          <table:table-cell/>
          <table:covered-table-cell table:style-name="ce329"/>
          <table:covered-table-cell table:style-name="ce333"/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5" calcext:value-type="float">
            <text:p>5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7" calcext:value-type="float">
            <text:p>7</text:p>
          </table:table-cell>
          <table:table-cell table:style-name="ce337" office:value-type="float" office:value="8" calcext:value-type="float">
            <text:p>8</text:p>
          </table:table-cell>
          <table:table-cell table:style-name="ce337" office:value-type="float" office:value="9" calcext:value-type="float">
            <text:p>9</text:p>
          </table:table-cell>
          <table:table-cell table:style-name="ce337" office:value-type="float" office:value="10" calcext:value-type="float">
            <text:p>10</text:p>
          </table:table-cell>
          <table:table-cell table:style-name="ce337" office:value-type="float" office:value="11" calcext:value-type="float">
            <text:p>11</text:p>
          </table:table-cell>
          <table:table-cell table:style-name="ce337" office:value-type="float" office:value="12" calcext:value-type="float">
            <text:p>12</text:p>
          </table:table-cell>
          <table:covered-table-cell table:style-name="ce341"/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Unidades</text:p>
          </table:table-cell>
          <table:table-cell table:style-name="ce190"/>
          <table:table-cell table:style-name="ce106" table:formula="of:=[$'a) Presupuesto_Ventas'.$C$9]" office:value-type="float" office:value="140" calcext:value-type="float">
            <text:p>140</text:p>
          </table:table-cell>
          <table:table-cell table:style-name="ce106" table:formula="of:=[$'a) Presupuesto_Ventas'.D9]" office:value-type="float" office:value="140" calcext:value-type="float">
            <text:p>140</text:p>
          </table:table-cell>
          <table:table-cell table:style-name="ce106" table:formula="of:=[$'a) Presupuesto_Ventas'.E9]" office:value-type="float" office:value="140" calcext:value-type="float">
            <text:p>140</text:p>
          </table:table-cell>
          <table:table-cell table:style-name="ce106" table:formula="of:=[$'a) Presupuesto_Ventas'.F9]" office:value-type="float" office:value="140" calcext:value-type="float">
            <text:p>140</text:p>
          </table:table-cell>
          <table:table-cell table:style-name="ce106" table:formula="of:=[$'a) Presupuesto_Ventas'.G9]" office:value-type="float" office:value="140" calcext:value-type="float">
            <text:p>140</text:p>
          </table:table-cell>
          <table:table-cell table:style-name="ce106" table:formula="of:=[$'a) Presupuesto_Ventas'.H9]" office:value-type="float" office:value="150" calcext:value-type="float">
            <text:p>150</text:p>
          </table:table-cell>
          <table:table-cell table:style-name="ce106" table:formula="of:=[$'a) Presupuesto_Ventas'.I9]" office:value-type="float" office:value="150" calcext:value-type="float">
            <text:p>150</text:p>
          </table:table-cell>
          <table:table-cell table:style-name="ce106" table:formula="of:=[$'a) Presupuesto_Ventas'.J9]" office:value-type="float" office:value="150" calcext:value-type="float">
            <text:p>150</text:p>
          </table:table-cell>
          <table:table-cell table:style-name="ce106" table:formula="of:=[$'a) Presupuesto_Ventas'.K9]" office:value-type="float" office:value="150" calcext:value-type="float">
            <text:p>150</text:p>
          </table:table-cell>
          <table:table-cell table:style-name="ce106" table:formula="of:=[$'a) Presupuesto_Ventas'.L9]" office:value-type="float" office:value="150" calcext:value-type="float">
            <text:p>150</text:p>
          </table:table-cell>
          <table:table-cell table:style-name="ce106" table:formula="of:=[$'a) Presupuesto_Ventas'.M9]" office:value-type="float" office:value="150" calcext:value-type="float">
            <text:p>150</text:p>
          </table:table-cell>
          <table:table-cell table:style-name="ce106" table:formula="of:=[$'a) Presupuesto_Ventas'.N9]" office:value-type="float" office:value="170" calcext:value-type="float">
            <text:p>170</text:p>
          </table:table-cell>
          <table:table-cell table:style-name="ce342" table:formula="of:=SUM([.D30:.O30])" office:value-type="float" office:value="1770" calcext:value-type="float">
            <text:p>1,770</text:p>
          </table:table-cell>
          <table:table-cell table:number-columns-repeated="16368"/>
        </table:table-row>
        <table:table-row table:style-name="ro4">
          <table:table-cell/>
          <table:table-cell table:style-name="ce330" office:value-type="string" calcext:value-type="string">
            <text:p>CV Unitario</text:p>
          </table:table-cell>
          <table:table-cell table:style-name="ce190"/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191" table:formula="of:=[$'g) Costos_Unitarios'.$F$23]" office:value-type="float" office:value="16.0985" calcext:value-type="float">
            <text:p>16.10</text:p>
          </table:table-cell>
          <table:table-cell table:style-name="ce343"/>
          <table:table-cell table:number-columns-repeated="16368"/>
        </table:table-row>
        <table:table-row table:style-name="ro4">
          <table:table-cell/>
          <table:table-cell table:style-name="ce171" office:value-type="string" calcext:value-type="string">
            <text:p>KW Requerido</text:p>
          </table:table-cell>
          <table:table-cell table:style-name="ce334"/>
          <table:table-cell table:style-name="ce334" table:formula="of:=[.D30]*[.D31]" office:value-type="float" office:value="2253.79" calcext:value-type="float">
            <text:p>2254</text:p>
          </table:table-cell>
          <table:table-cell table:style-name="ce334" table:formula="of:=[.E30]*[.E31]" office:value-type="float" office:value="2253.79" calcext:value-type="float">
            <text:p>2254</text:p>
          </table:table-cell>
          <table:table-cell table:style-name="ce334" table:formula="of:=[.F30]*[.F31]" office:value-type="float" office:value="2253.79" calcext:value-type="float">
            <text:p>2254</text:p>
          </table:table-cell>
          <table:table-cell table:style-name="ce334" table:formula="of:=[.G30]*[.G31]" office:value-type="float" office:value="2253.79" calcext:value-type="float">
            <text:p>2254</text:p>
          </table:table-cell>
          <table:table-cell table:style-name="ce334" table:formula="of:=[.H30]*[.H31]" office:value-type="float" office:value="2253.79" calcext:value-type="float">
            <text:p>2254</text:p>
          </table:table-cell>
          <table:table-cell table:style-name="ce334" table:formula="of:=[.I30]*[.I31]" office:value-type="float" office:value="2414.775" calcext:value-type="float">
            <text:p>2415</text:p>
          </table:table-cell>
          <table:table-cell table:style-name="ce334" table:formula="of:=[.J30]*[.J31]" office:value-type="float" office:value="2414.775" calcext:value-type="float">
            <text:p>2415</text:p>
          </table:table-cell>
          <table:table-cell table:style-name="ce334" table:formula="of:=[.K30]*[.K31]" office:value-type="float" office:value="2414.775" calcext:value-type="float">
            <text:p>2415</text:p>
          </table:table-cell>
          <table:table-cell table:style-name="ce334" table:formula="of:=[.L30]*[.L31]" office:value-type="float" office:value="2414.775" calcext:value-type="float">
            <text:p>2415</text:p>
          </table:table-cell>
          <table:table-cell table:style-name="ce334" table:formula="of:=[.M30]*[.M31]" office:value-type="float" office:value="2414.775" calcext:value-type="float">
            <text:p>2415</text:p>
          </table:table-cell>
          <table:table-cell table:style-name="ce334" table:formula="of:=[.N30]*[.N31]" office:value-type="float" office:value="2414.775" calcext:value-type="float">
            <text:p>2415</text:p>
          </table:table-cell>
          <table:table-cell table:style-name="ce334" table:formula="of:=[.O30]*[.O31]" office:value-type="float" office:value="2736.745" calcext:value-type="float">
            <text:p>2737</text:p>
          </table:table-cell>
          <table:table-cell table:style-name="ce343"/>
          <table:table-cell table:number-columns-repeated="16368"/>
        </table:table-row>
        <table:table-row table:style-name="ro4">
          <table:table-cell/>
          <table:table-cell table:style-name="ce331" office:value-type="string" calcext:value-type="string">
            <text:p>Variacion KW</text:p>
          </table:table-cell>
          <table:table-cell table:style-name="ce336" table:formula="of:=[.D32]" office:value-type="float" office:value="2253.79" calcext:value-type="float">
            <text:p>2254</text:p>
          </table:table-cell>
          <table:table-cell table:style-name="ce336" table:formula="of:=[.E32]-[.D32]" office:value-type="float" office:value="0" calcext:value-type="float">
            <text:p>0</text:p>
          </table:table-cell>
          <table:table-cell table:style-name="ce336" table:formula="of:=[.F32]-[.E32]" office:value-type="float" office:value="0" calcext:value-type="float">
            <text:p>0</text:p>
          </table:table-cell>
          <table:table-cell table:style-name="ce336" table:formula="of:=[.G32]-[.F32]" office:value-type="float" office:value="0" calcext:value-type="float">
            <text:p>0</text:p>
          </table:table-cell>
          <table:table-cell table:style-name="ce336" table:formula="of:=[.H32]-[.G32]" office:value-type="float" office:value="0" calcext:value-type="float">
            <text:p>0</text:p>
          </table:table-cell>
          <table:table-cell table:style-name="ce336" table:formula="of:=[.I32]-[.H32]" office:value-type="float" office:value="160.985" calcext:value-type="float">
            <text:p>161</text:p>
          </table:table-cell>
          <table:table-cell table:style-name="ce336" table:formula="of:=[.J32]-[.I32]" office:value-type="float" office:value="0" calcext:value-type="float">
            <text:p>0</text:p>
          </table:table-cell>
          <table:table-cell table:style-name="ce336" table:formula="of:=[.K32]-[.J32]" office:value-type="float" office:value="0" calcext:value-type="float">
            <text:p>0</text:p>
          </table:table-cell>
          <table:table-cell table:style-name="ce336" table:formula="of:=[.L32]-[.K32]" office:value-type="float" office:value="0" calcext:value-type="float">
            <text:p>0</text:p>
          </table:table-cell>
          <table:table-cell table:style-name="ce336" table:formula="of:=[.M32]-[.L32]" office:value-type="float" office:value="0" calcext:value-type="float">
            <text:p>0</text:p>
          </table:table-cell>
          <table:table-cell table:style-name="ce336" table:formula="of:=[.N32]-[.M32]" office:value-type="float" office:value="0" calcext:value-type="float">
            <text:p>0</text:p>
          </table:table-cell>
          <table:table-cell table:style-name="ce336" table:formula="of:=[.O32]-[.N32]" office:value-type="float" office:value="321.97" calcext:value-type="float">
            <text:p>322</text:p>
          </table:table-cell>
          <table:table-cell table:style-name="ce336"/>
          <table:table-cell table:style-name="ce345" table:formula="of:=SUM([.D33:.O33])" office:value-type="float" office:value="482.955" calcext:value-type="float">
            <text:p>483</text:p>
          </table:table-cell>
          <table:table-cell office:value-type="string" calcext:value-type="string">
            <text:p>van al flujo de caja en el año 2</text:p>
          </table:table-cell>
          <table:table-cell table:number-columns-repeated="16367"/>
        </table:table-row>
        <table:table-row table:style-name="ro4" table:number-rows-repeated="910">
          <table:table-cell table:number-columns-repeated="16384"/>
        </table:table-row>
        <table:table-row table:style-name="ro8" table:number-rows-repeated="104763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i) Estado de Resultados" table:style-name="ta16">
        <table:table-column table:style-name="co13" table:default-cell-style-name="ce20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8" table:default-cell-style-name="ce20"/>
        <table:table-column table:style-name="co46" table:default-cell-style-name="ce20"/>
        <table:table-column table:style-name="co13" table:number-columns-repeated="18" table:default-cell-style-name="ce20"/>
        <table:table-column table:style-name="co14" table:number-columns-repeated="16360" table:default-cell-style-name="ce20"/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table:style-name="ce22" office:value-type="string" calcext:value-type="string" table:number-columns-spanned="4" table:number-rows-spanned="1">
            <text:p>CUADRO N° 10</text:p>
          </table:table-cell>
          <table:covered-table-cell table:number-columns-repeated="3" table:style-name="ce22"/>
          <table:table-cell table:number-columns-repeated="16378"/>
        </table:table-row>
        <table:table-row table:style-name="ro7">
          <table:table-cell/>
          <table:table-cell table:style-name="ce348"/>
          <table:table-cell table:style-name="ce292" table:number-columns-spanned="4" table:number-rows-spanned="1"/>
          <table:covered-table-cell table:number-columns-repeated="3"/>
          <table:table-cell table:number-columns-repeated="16378"/>
        </table:table-row>
        <table:table-row table:style-name="ro7">
          <table:table-cell/>
          <table:table-cell table:style-name="ce82"/>
          <table:table-cell table:style-name="ce294" office:value-type="string" calcext:value-type="string" table:number-columns-spanned="4" table:number-rows-spanned="1">
            <text:p>ESTADO DE RESULTADOS ECONÓMICO</text:p>
          </table:table-cell>
          <table:covered-table-cell table:number-columns-repeated="3" table:style-name="ce294"/>
          <table:table-cell table:number-columns-repeated="16378"/>
        </table:table-row>
        <table:table-row table:style-name="ro4">
          <table:table-cell/>
          <table:table-cell table:style-name="ce82"/>
          <table:table-cell table:style-name="ce244" table:number-columns-repeated="4"/>
          <table:table-cell table:number-columns-repeated="16378"/>
        </table:table-row>
        <table:table-row table:style-name="ro4">
          <table:table-cell/>
          <table:table-cell table:style-name="ce82"/>
          <table:table-cell table:style-name="ce349" office:value-type="string" calcext:value-type="string" table:number-columns-spanned="4" table:number-rows-spanned="1">
            <text:p>REGIMEN TRIBUTARIO MYPE TRIBUTARIO </text:p>
          </table:table-cell>
          <table:covered-table-cell table:number-columns-repeated="3" table:style-name="ce349"/>
          <table:table-cell table:number-columns-repeated="16378"/>
        </table:table-row>
        <table:table-row table:style-name="ro7">
          <table:table-cell table:number-columns-repeated="2"/>
          <table:table-cell table:style-name="ce244" table:number-columns-repeated="4"/>
          <table:table-cell table:number-columns-repeated="16378"/>
        </table:table-row>
        <table:table-row table:style-name="ro7">
          <table:table-cell table:number-columns-repeated="2"/>
          <table:table-cell table:style-name="ce350" office:value-type="string" calcext:value-type="string">
            <text:p>RUBRO</text:p>
          </table:table-cell>
          <table:table-cell table:style-name="ce353" office:value-type="float" office:value="1" calcext:value-type="float">
            <office:annotation draw:style-name="gr3" draw:text-style-name="P4" svg:width="2.29cm" svg:height="3.476cm" svg:x="9.835cm" svg:y="1.164cm" draw:caption-point-x="-0.142cm" draw:caption-point-y="2.233cm">
              <dc:creator>Edison Achalma Mendoza</dc:creator>
              <dc:date>2024-07-31T03:28:00</dc:date>
              <text:p>Jhony Escobar:</text:p>
              <text:p><text:span text:style-name="T2">Valor residual, aplica para compra de activos. Es el valor del activo al final del prestámo</text:span></text:p>
            </office:annotation>
            <text:p>1</text:p>
          </table:table-cell>
          <table:table-cell table:style-name="ce353" table:formula="of:=1+[.D8]" office:value-type="float" office:value="2" calcext:value-type="float">
            <text:p>2</text:p>
          </table:table-cell>
          <table:table-cell table:style-name="ce353" table:formula="of:=1+[.E8]" office:value-type="float" office:value="3" calcext:value-type="float">
            <text:p>3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51" office:value-type="string" calcext:value-type="string">
            <text:p>Ingresos por ventas </text:p>
          </table:table-cell>
          <table:table-cell table:style-name="ce354" table:formula="of:=[.D10]*[.D11]" office:value-type="float" office:value="36337.5" calcext:value-type="float">
            <office:annotation draw:style-name="gr4" draw:text-style-name="P4" svg:width="3.491cm" svg:height="1.798cm" svg:x="24.243cm" svg:y="3.784cm" draw:caption-point-x="-14.55cm" draw:caption-point-y="0.089cm">
              <dc:creator>Edison Achalma Mendoza</dc:creator>
              <dc:date>2024-07-31T03:28:00</dc:date>
              <text:p>Jhony Escobar:</text:p>
              <text:p><text:span text:style-name="T2">Número de meses que dura el Prestamo.</text:span></text:p>
            </office:annotation>
            <text:p>36338</text:p>
          </table:table-cell>
          <table:table-cell table:style-name="ce354" table:formula="of:=[.E10]*[.E11]" office:value-type="float" office:value="40755" calcext:value-type="float">
            <text:p>40755</text:p>
          </table:table-cell>
          <table:table-cell table:style-name="ce354" table:formula="of:=[.F10]*[.F11]" office:value-type="float" office:value="50445" calcext:value-type="float">
            <text:p>50445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Cantidad</text:p>
          </table:table-cell>
          <table:table-cell table:style-name="ce355" table:formula="of:=[$'a) Presupuesto_Ventas'.O7]" office:value-type="float" office:value="1275" calcext:value-type="float">
            <office:annotation draw:style-name="gr5" draw:text-style-name="P4" svg:width="3.492cm" svg:height="1.745cm" svg:x="16.252cm" svg:y="4.472cm" draw:caption-point-x="-6.559cm" draw:caption-point-y="-0.149cm">
              <dc:creator>Edison Achalma Mendoza</dc:creator>
              <dc:date>2024-07-31T03:28:00</dc:date>
              <text:p>Jhony Escobar:</text:p>
              <text:p><text:span text:style-name="T2">Tasa de Interés Efectiva Anual.</text:span></text:p>
              <text:p><text:span text:style-name="T2"/></text:p>
            </office:annotation>
            <text:p>1275</text:p>
          </table:table-cell>
          <table:table-cell table:style-name="ce355" table:formula="of:=[$'a) Presupuesto_Ventas'.O8]" office:value-type="float" office:value="1430" calcext:value-type="float">
            <text:p>1430</text:p>
          </table:table-cell>
          <table:table-cell table:style-name="ce355" table:formula="of:=[$'a) Presupuesto_Ventas'.O9]" office:value-type="float" office:value="1770" calcext:value-type="float">
            <text:p>1770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Precio</text:p>
          </table:table-cell>
          <table:table-cell table:style-name="ce356" table:formula="of:=Valor_del_cojin" office:value-type="float" office:value="28.5" calcext:value-type="float">
            <text:p>28.5</text:p>
          </table:table-cell>
          <table:table-cell table:style-name="ce356" table:formula="of:=Valor_del_cojin" office:value-type="float" office:value="28.5" calcext:value-type="float">
            <text:p>28.5</text:p>
          </table:table-cell>
          <table:table-cell table:style-name="ce356" table:formula="of:=Valor_del_cojin" office:value-type="float" office:value="28.5" calcext:value-type="float">
            <text:p>28.5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51" office:value-type="string" calcext:value-type="string">
            <text:p>(-) Costo de ventas</text:p>
          </table:table-cell>
          <table:table-cell table:style-name="ce357" table:formula="of:=SUM([.D13:.D16])" office:value-type="float" office:value="25473.9184684685" calcext:value-type="float">
            <text:p>25,474</text:p>
          </table:table-cell>
          <table:table-cell table:style-name="ce357" table:formula="of:=SUM([.E13:.E16])" office:value-type="float" office:value="26687.5684684685" calcext:value-type="float">
            <text:p>26,688</text:p>
          </table:table-cell>
          <table:table-cell table:style-name="ce357" table:formula="of:=SUM([.F13:.F16])" office:value-type="float" office:value="32185.3684684685" calcext:value-type="float">
            <text:p>32,185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MDP</text:p>
          </table:table-cell>
          <table:table-cell table:style-name="ce355" table:formula="of:=[$'d) Costos_producción'.D8]*[$'a) Presupuesto_Ventas'.O7]" office:value-type="float" office:value="9983.25" calcext:value-type="float">
            <text:p>9983</text:p>
          </table:table-cell>
          <table:table-cell table:style-name="ce355" table:formula="of:=[$'d) Costos_producción'.D8]*[$'a) Presupuesto_Ventas'.O8]" office:value-type="float" office:value="11196.9" calcext:value-type="float">
            <text:p>11197</text:p>
          </table:table-cell>
          <table:table-cell table:style-name="ce355" table:formula="of:=[.F10]*[$'d) Costos_producción'.$D$8]" office:value-type="float" office:value="13859.1" calcext:value-type="float">
            <text:p>13859</text:p>
          </table:table-cell>
          <table:table-cell/>
          <table:table-cell office:value-type="float" office:value="11196.9" calcext:value-type="float">
            <text:p>11196.9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304" office:value-type="string" calcext:value-type="string">
            <text:p>MOD</text:p>
          </table:table-cell>
          <table:table-cell table:style-name="ce355" table:formula="of:=[$'d) Costos_producción'.D15]*[$'a) Presupuesto_Ventas'.O8]" office:value-type="float" office:value="11926.2" calcext:value-type="float">
            <text:p>11926</text:p>
          </table:table-cell>
          <table:table-cell table:style-name="ce355" table:formula="of:=[.E10]*[$'d) Costos_producción'.$D$15]" office:value-type="float" office:value="11926.2" calcext:value-type="float">
            <text:p>11926</text:p>
          </table:table-cell>
          <table:table-cell table:style-name="ce355" table:formula="of:=[.F10]*[$'d) Costos_producción'.$D$15]" office:value-type="float" office:value="14761.8" calcext:value-type="float">
            <text:p>14762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CIF</text:p>
          </table:table-cell>
          <table:table-cell table:style-name="ce355" table:formula="of:=[$'d) Costos_producción'.F19]*12" office:value-type="float" office:value="2496" calcext:value-type="float">
            <text:p>2496</text:p>
          </table:table-cell>
          <table:table-cell table:style-name="ce355" table:formula="of:=[$'d) Costos_producción'.$F$19]*12" office:value-type="float" office:value="2496" calcext:value-type="float">
            <text:p>2496</text:p>
          </table:table-cell>
          <table:table-cell table:style-name="ce355" table:formula="of:=[$'d) Costos_producción'.$F$19]*12" office:value-type="float" office:value="2496" calcext:value-type="float">
            <text:p>2496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Depreciacion Activo Fijo</text:p>
          </table:table-cell>
          <table:table-cell table:style-name="ce355" table:formula="of:=[$'c) Dep. y VR'.$F$8]" office:value-type="float" office:value="1068.46846846847" calcext:value-type="float">
            <text:p>1068</text:p>
          </table:table-cell>
          <table:table-cell table:style-name="ce355" table:formula="of:=[$'c) Dep. y VR'.F8]" office:value-type="float" office:value="1068.46846846847" calcext:value-type="float">
            <text:p>1068</text:p>
          </table:table-cell>
          <table:table-cell table:style-name="ce355" table:formula="of:=[$'c) Dep. y VR'.F8]" office:value-type="float" office:value="1068.46846846847" calcext:value-type="float">
            <text:p>1068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7" office:value-type="string" calcext:value-type="string">
            <text:p>Utilidad Bruta</text:p>
          </table:table-cell>
          <table:table-cell table:style-name="ce358" table:formula="of:=[.D9]-[.D12]" office:value-type="float" office:value="10863.5815315315" calcext:value-type="float">
            <text:p>10864</text:p>
          </table:table-cell>
          <table:table-cell table:style-name="ce358" table:formula="of:=[.E9]-[.E12]" office:value-type="float" office:value="14067.4315315315" calcext:value-type="float">
            <text:p>14067</text:p>
          </table:table-cell>
          <table:table-cell table:style-name="ce358" table:formula="of:=[.F9]-[.F12]" office:value-type="float" office:value="18259.6315315315" calcext:value-type="float">
            <text:p>18260</text:p>
          </table:table-cell>
          <table:table-cell table:style-name="ce363"/>
          <table:table-cell table:number-columns-repeated="16377"/>
        </table:table-row>
        <table:table-row table:style-name="ro4">
          <table:table-cell table:number-columns-repeated="2"/>
          <table:table-cell table:style-name="ce304" office:value-type="string" calcext:value-type="string">
            <text:p>(-) Gastos operativos</text:p>
          </table:table-cell>
          <table:table-cell table:style-name="ce357" table:formula="of:=[$'f) Gastos_Operativos'.H21]*12" office:value-type="float" office:value="18722.4" calcext:value-type="float">
            <text:p>18,722</text:p>
          </table:table-cell>
          <table:table-cell table:style-name="ce357" table:formula="of:=[.E19]+[.E20]" office:value-type="float" office:value="18722.4" calcext:value-type="float">
            <text:p>18,722</text:p>
          </table:table-cell>
          <table:table-cell table:style-name="ce357" table:formula="of:=[.F19]+[.F20]" office:value-type="float" office:value="18722.4" calcext:value-type="float">
            <text:p>18,722</text:p>
          </table:table-cell>
          <table:table-cell table:number-columns-repeated="2"/>
          <table:table-cell table:style-name="ce348"/>
          <table:table-cell table:number-columns-repeated="16375"/>
        </table:table-row>
        <table:table-row table:style-name="ro4">
          <table:table-cell table:number-columns-repeated="2"/>
          <table:table-cell table:style-name="ce304" office:value-type="string" calcext:value-type="string">
            <text:p>Gastos administrativos</text:p>
          </table:table-cell>
          <table:table-cell table:style-name="ce359" table:formula="of:=[$'f) Gastos_Operativos'.$H$15]*12" office:value-type="float" office:value="14560.5" calcext:value-type="float">
            <text:p>14,561</text:p>
          </table:table-cell>
          <table:table-cell table:style-name="ce355" table:formula="of:=([$'f) Gastos_Operativos'.D15])*12" office:value-type="float" office:value="14560.5" calcext:value-type="float">
            <text:p>14561</text:p>
          </table:table-cell>
          <table:table-cell table:style-name="ce355" table:formula="of:=([$'f) Gastos_Operativos'.D15])*12" office:value-type="float" office:value="14560.5" calcext:value-type="float">
            <text:p>14561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Gastos de ventas</text:p>
          </table:table-cell>
          <table:table-cell table:style-name="ce359" table:formula="of:=[$'f) Gastos_Operativos'.$H$20]*12" office:value-type="float" office:value="4161.9" calcext:value-type="float">
            <text:p>4,162</text:p>
          </table:table-cell>
          <table:table-cell table:style-name="ce359" table:formula="of:=[$'f) Gastos_Operativos'.H20]*12" office:value-type="float" office:value="4161.9" calcext:value-type="float">
            <text:p>4,162</text:p>
          </table:table-cell>
          <table:table-cell table:style-name="ce359" table:formula="of:=[$'f) Gastos_Operativos'.H20]*12" office:value-type="float" office:value="4161.9" calcext:value-type="float">
            <text:p>4,162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Amortizacion de intangibles</text:p>
          </table:table-cell>
          <table:table-cell table:style-name="ce355" table:formula="of:=[$'c) Dep. y VR'.F16]" office:value-type="float" office:value="40.5405405405405" calcext:value-type="float">
            <text:p>41</text:p>
          </table:table-cell>
          <table:table-cell table:style-name="ce355" table:formula="of:=[$'c) Dep. y VR'.F16]" office:value-type="float" office:value="40.5405405405405" calcext:value-type="float">
            <text:p>41</text:p>
          </table:table-cell>
          <table:table-cell table:style-name="ce355" table:formula="of:=[$'c) Dep. y VR'.F16]" office:value-type="float" office:value="40.5405405405405" calcext:value-type="float">
            <text:p>41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7" office:value-type="string" calcext:value-type="string">
            <text:p>Utilidad Operativa</text:p>
          </table:table-cell>
          <table:table-cell table:style-name="ce358" table:formula="of:=[.D17]-[.D19]-[.D20]-[.D21]" office:value-type="float" office:value="-7899.35900900901" calcext:value-type="float">
            <text:p>-7899</text:p>
          </table:table-cell>
          <table:table-cell table:style-name="ce358" table:formula="of:=[.E17]-[.E19]-[.E20]-[.E21]" office:value-type="float" office:value="-4695.50900900901" calcext:value-type="float">
            <text:p>-4696</text:p>
          </table:table-cell>
          <table:table-cell table:style-name="ce358" table:formula="of:=[.F17]-[.F19]-[.F20]-[.F21]" office:value-type="float" office:value="-503.309009009011" calcext:value-type="float">
            <text:p>-503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04" office:value-type="string" calcext:value-type="string">
            <text:p>(-)Intereses</text:p>
          </table:table-cell>
          <table:table-cell table:style-name="ce359" office:value-type="float" office:value="0" calcext:value-type="float">
            <text:p>0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351" office:value-type="string" calcext:value-type="string">
            <text:p>Pérdida</text:p>
          </table:table-cell>
          <table:table-cell table:style-name="ce354" table:formula="of:=[.D22]-[.D23]" office:value-type="float" office:value="-7899.35900900901" calcext:value-type="float">
            <text:p>-7899</text:p>
          </table:table-cell>
          <table:table-cell table:style-name="ce354" table:formula="of:=[.E22]-[.E23]" office:value-type="float" office:value="-4695.50900900901" calcext:value-type="float">
            <text:p>-4696</text:p>
          </table:table-cell>
          <table:table-cell table:style-name="ce354" table:formula="of:=[.F22]-[.F23]" office:value-type="float" office:value="-503.309009009011" calcext:value-type="float">
            <text:p>-503</text:p>
          </table:table-cell>
          <table:table-cell table:number-columns-repeated="16378"/>
        </table:table-row>
        <table:table-row table:style-name="ro7">
          <table:table-cell table:number-columns-repeated="2"/>
          <table:table-cell table:style-name="ce311" office:value-type="string" calcext:value-type="string">
            <text:p>Impuesto a la renta (*)</text:p>
          </table:table-cell>
          <table:table-cell table:number-columns-repeated="3" table:style-name="ce360" office:value-type="float" office:value="0" calcext:value-type="float">
            <text:p>0</text:p>
          </table:table-cell>
          <table:table-cell table:number-columns-repeated="16378"/>
        </table:table-row>
        <table:table-row table:style-name="ro7">
          <table:table-cell table:number-columns-repeated="2"/>
          <table:table-cell table:style-name="ce352" office:value-type="string" calcext:value-type="string">
            <text:p>Utilidad Neta</text:p>
          </table:table-cell>
          <table:table-cell table:style-name="ce361" table:formula="of:=[.D24]-[.D25]" office:value-type="float" office:value="-7899.35900900901" calcext:value-type="float">
            <text:p>-7899</text:p>
          </table:table-cell>
          <table:table-cell table:style-name="ce361" table:formula="of:=[.E24]-[.E25]" office:value-type="float" office:value="-4695.50900900901" calcext:value-type="float">
            <text:p>-4696</text:p>
          </table:table-cell>
          <table:table-cell table:style-name="ce361" table:formula="of:=[.F24]-[.F25]" office:value-type="float" office:value="-503.309009009011" calcext:value-type="float">
            <text:p>-503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244" office:value-type="string" calcext:value-type="string">
            <text:p>(*) Con MYPE tributario es escalonado de acuerdo a utilidad Imponible</text:p>
          </table:table-cell>
          <table:table-cell table:style-name="ce244" table:number-columns-repeated="3"/>
          <table:table-cell/>
          <table:table-cell table:style-name="ce363" table:number-columns-repeated="2"/>
          <table:table-cell table:number-columns-repeated="16375"/>
        </table:table-row>
        <table:table-row table:style-name="ro4">
          <table:table-cell table:number-columns-repeated="2"/>
          <table:table-cell table:style-name="ce244" office:value-type="string" calcext:value-type="string">
            <text:p><text:s text:c="5"/>Con RG 29.5% sobre la utilidad imponible</text:p>
          </table:table-cell>
          <table:table-cell table:style-name="ce244" table:number-columns-repeated="3"/>
          <table:table-cell table:number-columns-repeated="16378"/>
        </table:table-row>
        <table:table-row table:style-name="ro4">
          <table:table-cell table:number-columns-repeated="6"/>
          <table:table-cell table:style-name="ce363"/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4" table:number-rows-repeated="951">
          <table:table-cell table:number-columns-repeated="16384"/>
        </table:table-row>
        <table:table-row table:style-name="ro8" table:number-rows-repeated="104759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PLAN DE PAGOS" table:style-name="ta17">
        <table:table-column table:style-name="co40" table:default-cell-style-name="ce368"/>
        <table:table-column table:style-name="co61" table:default-cell-style-name="ce374"/>
        <table:table-column table:style-name="co47" table:default-cell-style-name="ce374"/>
        <table:table-column table:style-name="co62" table:number-columns-repeated="2" table:default-cell-style-name="ce374"/>
        <table:table-column table:style-name="co61" table:default-cell-style-name="ce374"/>
        <table:table-column table:style-name="co63" table:visibility="collapse" table:number-columns-repeated="16377" table:default-cell-style-name="ce379"/>
        <table:table-column table:style-name="co3" table:default-cell-style-name="ce379"/>
        <table:table-row table:style-name="ro1">
          <table:table-cell table:style-name="ce364"/>
          <table:table-cell table:style-name="ce369" table:number-columns-repeated="5"/>
          <table:table-cell table:number-columns-repeated="16378"/>
        </table:table-row>
        <table:table-row table:style-name="ro1">
          <table:table-cell table:style-name="ce364"/>
          <table:table-cell table:style-name="ce369"/>
          <table:table-cell table:style-name="ce375" table:formula="of:=[.XFD2]" office:value-type="string" office:string-value="" calcext:value-type="error">
            <text:p>Err:509</text:p>
          </table:table-cell>
          <table:table-cell table:style-name="ce369" office:value-type="string" calcext:value-type="string">
            <text:p>dólares</text:p>
          </table:table-cell>
          <table:table-cell table:style-name="ce369" table:number-columns-repeated="2"/>
          <table:table-cell table:number-columns-repeated="16377"/>
          <table:table-cell table:style-name="ce380" table:formula="of:='b) inversión inicial'!#ref!" office:value-type="string" office:string-value="" calcext:value-type="error">
            <text:p>Err:509</text:p>
          </table:table-cell>
        </table:table-row>
        <table:table-row table:style-name="ro1">
          <table:table-cell table:style-name="ce364"/>
          <table:table-cell table:style-name="ce369"/>
          <table:table-cell table:style-name="ce376" office:value-type="percentage" office:value="0.015" calcext:value-type="percentage">
            <text:p>1.50 %</text:p>
          </table:table-cell>
          <table:table-cell table:style-name="ce369" table:number-columns-repeated="3"/>
          <table:table-cell table:number-columns-repeated="16377"/>
          <table:table-cell table:style-name="ce381" table:formula="of:=[.XFD2]/3.6" office:value-type="string" office:string-value="" calcext:value-type="error">
            <text:p>Err:509</text:p>
          </table:table-cell>
        </table:table-row>
        <table:table-row table:style-name="ro1">
          <table:table-cell table:style-name="ce364"/>
          <table:table-cell table:style-name="ce369"/>
          <table:table-cell table:style-name="ce377" office:value-type="float" office:value="12" calcext:value-type="float">
            <text:p>12</text:p>
          </table:table-cell>
          <table:table-cell table:style-name="ce369" table:number-columns-repeated="3"/>
          <table:table-cell table:number-columns-repeated="16377"/>
          <table:table-cell table:formula="of:=1.5/3.6" office:value-type="float" office:value="0.416666666666667" calcext:value-type="float">
            <text:p>0.416666666666667</text:p>
          </table:table-cell>
        </table:table-row>
        <table:table-row table:style-name="ro1">
          <table:table-cell table:style-name="ce364"/>
          <table:table-cell table:style-name="ce369" table:number-columns-repeated="5"/>
          <table:table-cell table:number-columns-repeated="16378"/>
        </table:table-row>
        <table:table-row table:style-name="ro1" table:number-rows-repeated="3">
          <table:table-cell table:style-name="ce364"/>
          <table:table-cell table:style-name="ce369" table:number-columns-repeated="5"/>
          <table:table-cell table:number-columns-repeated="16378"/>
        </table:table-row>
        <table:table-row table:style-name="ro1">
          <table:table-cell table:style-name="ce364"/>
          <table:table-cell table:style-name="ce370" table:formula="of:=SUM([.B11:.B371])" office:value-type="string" office:string-value="" calcext:value-type="error">
            <text:p>Err:509</text:p>
          </table:table-cell>
          <table:table-cell table:style-name="ce370" table:formula="of:=SUM([.C11:.C371])" office:value-type="string" office:string-value="" calcext:value-type="error">
            <text:p>Err:509</text:p>
          </table:table-cell>
          <table:table-cell table:style-name="ce370" table:formula="of:=SUM([.D11:.D371])" office:value-type="string" office:string-value="" calcext:value-type="error">
            <text:p>Err:509</text:p>
          </table:table-cell>
          <table:table-cell table:style-name="ce369" table:number-columns-repeated="2"/>
          <table:table-cell/>
          <table:table-cell table:style-name="ce374"/>
          <table:table-cell table:number-columns-repeated="16376"/>
        </table:table-row>
        <table:table-row table:style-name="ro1">
          <table:table-cell table:style-name="ce365" office:value-type="string" calcext:value-type="string">
            <text:p>Mes</text:p>
          </table:table-cell>
          <table:table-cell table:style-name="ce371" office:value-type="string" calcext:value-type="string">
            <text:p>principal</text:p>
          </table:table-cell>
          <table:table-cell table:style-name="ce371" office:value-type="string" calcext:value-type="string">
            <text:p>interes</text:p>
          </table:table-cell>
          <table:table-cell table:style-name="ce371" office:value-type="string" calcext:value-type="string">
            <text:p>cuota</text:p>
          </table:table-cell>
          <table:table-cell table:style-name="ce371" office:value-type="string" calcext:value-type="string">
            <text:p>saldo final</text:p>
          </table:table-cell>
          <table:table-cell table:style-name="ce378"/>
          <table:table-cell table:number-columns-repeated="16378"/>
        </table:table-row>
        <table:table-row table:style-name="ro1">
          <table:table-cell table:style-name="ce366" office:value-type="float" office:value="1" calcext:value-type="float">
            <text:p>1</text:p>
          </table:table-cell>
          <table:table-cell table:style-name="ce372" table:formula="of:=IF([.A11]=0;0;(PPMT([.$C$3];[.A11];[.$C$4];-[.$C$2])))" office:value-type="string" office:string-value="" calcext:value-type="error">
            <text:p>Err:509</text:p>
          </table:table-cell>
          <table:table-cell table:style-name="ce372" table:formula="of:=IF([.A11]=0;0;(IPMT([.$C$3];[.A11];[.$C$4];-[.$C$2])))" office:value-type="string" office:string-value="" calcext:value-type="error">
            <text:p>Err:509</text:p>
          </table:table-cell>
          <table:table-cell table:style-name="ce372" table:formula="of:=IF([.A11]=0;0;(PMT([.$C$3];[.$C$4];-[.$C$2])))" office:value-type="string" office:string-value="" calcext:value-type="error">
            <text:p>Err:509</text:p>
          </table:table-cell>
          <table:table-cell table:style-name="ce372" table:formula="of:=IF([.A11]=0;0;([.$C$2]-[.F11]))" office:value-type="string" office:string-value="" calcext:value-type="error">
            <text:p>Err:509</text:p>
          </table:table-cell>
          <table:table-cell table:style-name="ce372" table:formula="of:=+[.B11]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1]&gt;=[.$C$4];0;IF([.A11]=0;0;(1+[.A11])))" office:value-type="float" office:value="2" calcext:value-type="float">
            <text:p>2</text:p>
          </table:table-cell>
          <table:table-cell table:style-name="ce372" table:formula="of:=IF([.A12]=0;0;(PPMT([.$C$3];[.A12];[.$C$4];-[.$C$2])))" office:value-type="string" office:string-value="" calcext:value-type="error">
            <text:p>Err:509</text:p>
          </table:table-cell>
          <table:table-cell table:style-name="ce372" table:formula="of:=IF([.A12]=0;0;(IPMT([.$C$3];[.A12];[.$C$4];-[.$C$2])))" office:value-type="string" office:string-value="" calcext:value-type="error">
            <text:p>Err:509</text:p>
          </table:table-cell>
          <table:table-cell table:style-name="ce372" table:formula="of:=IF([.A12]=0;0;(PMT([.$C$3];[.$C$4];-[.$C$2])))" office:value-type="string" office:string-value="" calcext:value-type="error">
            <text:p>Err:509</text:p>
          </table:table-cell>
          <table:table-cell table:style-name="ce372" table:formula="of:=IF([.A12]=0;0;([.$C$2]-[.F12]))" office:value-type="string" office:string-value="" calcext:value-type="error">
            <text:p>Err:509</text:p>
          </table:table-cell>
          <table:table-cell table:style-name="ce372" table:formula="of:=IF([.A12]=0;0;([.B12]+[.F11]))" office:value-type="string" office:string-value="" calcext:value-type="error">
            <text:p>Err:509</text:p>
          </table:table-cell>
          <table:table-cell table:style-name="ce374"/>
          <table:table-cell table:number-columns-repeated="16377"/>
        </table:table-row>
        <table:table-row table:style-name="ro1">
          <table:table-cell table:style-name="ce366" table:formula="of:=IF([.A12]&gt;=[.$C$4];0;IF([.A12]=0;0;(1+[.A12])))" office:value-type="float" office:value="3" calcext:value-type="float">
            <text:p>3</text:p>
          </table:table-cell>
          <table:table-cell table:style-name="ce372" table:formula="of:=IF([.A13]=0;0;(PPMT([.$C$3];[.A13];[.$C$4];-[.$C$2])))" office:value-type="string" office:string-value="" calcext:value-type="error">
            <text:p>Err:509</text:p>
          </table:table-cell>
          <table:table-cell table:style-name="ce372" table:formula="of:=IF([.A13]=0;0;(IPMT([.$C$3];[.A13];[.$C$4];-[.$C$2])))" office:value-type="string" office:string-value="" calcext:value-type="error">
            <text:p>Err:509</text:p>
          </table:table-cell>
          <table:table-cell table:style-name="ce372" table:formula="of:=IF([.A13]=0;0;(PMT([.$C$3];[.$C$4];-[.$C$2])))" office:value-type="string" office:string-value="" calcext:value-type="error">
            <text:p>Err:509</text:p>
          </table:table-cell>
          <table:table-cell table:style-name="ce372" table:formula="of:=IF([.A13]=0;0;([.$C$2]-[.F13]))" office:value-type="string" office:string-value="" calcext:value-type="error">
            <text:p>Err:509</text:p>
          </table:table-cell>
          <table:table-cell table:style-name="ce372" table:formula="of:=IF([.A13]=0;0;([.B13]+[.F12]))" office:value-type="string" office:string-value="" calcext:value-type="error">
            <text:p>Err:509</text:p>
          </table:table-cell>
          <table:table-cell table:style-name="ce374"/>
          <table:table-cell table:number-columns-repeated="16377"/>
        </table:table-row>
        <table:table-row table:style-name="ro1">
          <table:table-cell table:style-name="ce366" table:formula="of:=IF([.A13]&gt;=[.$C$4];0;IF([.A13]=0;0;(1+[.A13])))" office:value-type="float" office:value="4" calcext:value-type="float">
            <text:p>4</text:p>
          </table:table-cell>
          <table:table-cell table:style-name="ce372" table:formula="of:=IF([.A14]=0;0;(PPMT([.$C$3];[.A14];[.$C$4];-[.$C$2])))" office:value-type="string" office:string-value="" calcext:value-type="error">
            <text:p>Err:509</text:p>
          </table:table-cell>
          <table:table-cell table:style-name="ce372" table:formula="of:=IF([.A14]=0;0;(IPMT([.$C$3];[.A14];[.$C$4];-[.$C$2])))" office:value-type="string" office:string-value="" calcext:value-type="error">
            <text:p>Err:509</text:p>
          </table:table-cell>
          <table:table-cell table:style-name="ce372" table:formula="of:=IF([.A14]=0;0;(PMT([.$C$3];[.$C$4];-[.$C$2])))" office:value-type="string" office:string-value="" calcext:value-type="error">
            <text:p>Err:509</text:p>
          </table:table-cell>
          <table:table-cell table:style-name="ce372" table:formula="of:=IF([.A14]=0;0;([.$C$2]-[.F14]))" office:value-type="string" office:string-value="" calcext:value-type="error">
            <text:p>Err:509</text:p>
          </table:table-cell>
          <table:table-cell table:style-name="ce372" table:formula="of:=IF([.A14]=0;0;([.B14]+[.F13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4]&gt;=[.$C$4];0;IF([.A14]=0;0;(1+[.A14])))" office:value-type="float" office:value="5" calcext:value-type="float">
            <text:p>5</text:p>
          </table:table-cell>
          <table:table-cell table:style-name="ce372" table:formula="of:=IF([.A15]=0;0;(PPMT([.$C$3];[.A15];[.$C$4];-[.$C$2])))" office:value-type="string" office:string-value="" calcext:value-type="error">
            <text:p>Err:509</text:p>
          </table:table-cell>
          <table:table-cell table:style-name="ce372" table:formula="of:=IF([.A15]=0;0;(IPMT([.$C$3];[.A15];[.$C$4];-[.$C$2])))" office:value-type="string" office:string-value="" calcext:value-type="error">
            <text:p>Err:509</text:p>
          </table:table-cell>
          <table:table-cell table:style-name="ce372" table:formula="of:=IF([.A15]=0;0;(PMT([.$C$3];[.$C$4];-[.$C$2])))" office:value-type="string" office:string-value="" calcext:value-type="error">
            <text:p>Err:509</text:p>
          </table:table-cell>
          <table:table-cell table:style-name="ce372" table:formula="of:=IF([.A15]=0;0;([.$C$2]-[.F15]))" office:value-type="string" office:string-value="" calcext:value-type="error">
            <text:p>Err:509</text:p>
          </table:table-cell>
          <table:table-cell table:style-name="ce372" table:formula="of:=IF([.A15]=0;0;([.B15]+[.F14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5]&gt;=[.$C$4];0;IF([.A15]=0;0;(1+[.A15])))" office:value-type="float" office:value="6" calcext:value-type="float">
            <text:p>6</text:p>
          </table:table-cell>
          <table:table-cell table:style-name="ce372" table:formula="of:=IF([.A16]=0;0;(PPMT([.$C$3];[.A16];[.$C$4];-[.$C$2])))" office:value-type="string" office:string-value="" calcext:value-type="error">
            <text:p>Err:509</text:p>
          </table:table-cell>
          <table:table-cell table:style-name="ce372" table:formula="of:=IF([.A16]=0;0;(IPMT([.$C$3];[.A16];[.$C$4];-[.$C$2])))" office:value-type="string" office:string-value="" calcext:value-type="error">
            <text:p>Err:509</text:p>
          </table:table-cell>
          <table:table-cell table:style-name="ce372" table:formula="of:=IF([.A16]=0;0;(PMT([.$C$3];[.$C$4];-[.$C$2])))" office:value-type="string" office:string-value="" calcext:value-type="error">
            <text:p>Err:509</text:p>
          </table:table-cell>
          <table:table-cell table:style-name="ce372" table:formula="of:=IF([.A16]=0;0;([.$C$2]-[.F16]))" office:value-type="string" office:string-value="" calcext:value-type="error">
            <text:p>Err:509</text:p>
          </table:table-cell>
          <table:table-cell table:style-name="ce372" table:formula="of:=IF([.A16]=0;0;([.B16]+[.F15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6]&gt;=[.$C$4];0;IF([.A16]=0;0;(1+[.A16])))" office:value-type="float" office:value="7" calcext:value-type="float">
            <text:p>7</text:p>
          </table:table-cell>
          <table:table-cell table:style-name="ce372" table:formula="of:=IF([.A17]=0;0;(PPMT([.$C$3];[.A17];[.$C$4];-[.$C$2])))" office:value-type="string" office:string-value="" calcext:value-type="error">
            <text:p>Err:509</text:p>
          </table:table-cell>
          <table:table-cell table:style-name="ce372" table:formula="of:=IF([.A17]=0;0;(IPMT([.$C$3];[.A17];[.$C$4];-[.$C$2])))" office:value-type="string" office:string-value="" calcext:value-type="error">
            <text:p>Err:509</text:p>
          </table:table-cell>
          <table:table-cell table:style-name="ce372" table:formula="of:=IF([.A17]=0;0;(PMT([.$C$3];[.$C$4];-[.$C$2])))" office:value-type="string" office:string-value="" calcext:value-type="error">
            <text:p>Err:509</text:p>
          </table:table-cell>
          <table:table-cell table:style-name="ce372" table:formula="of:=IF([.A17]=0;0;([.$C$2]-[.F17]))" office:value-type="string" office:string-value="" calcext:value-type="error">
            <text:p>Err:509</text:p>
          </table:table-cell>
          <table:table-cell table:style-name="ce372" table:formula="of:=IF([.A17]=0;0;([.B17]+[.F16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7]&gt;=[.$C$4];0;IF([.A17]=0;0;(1+[.A17])))" office:value-type="float" office:value="8" calcext:value-type="float">
            <text:p>8</text:p>
          </table:table-cell>
          <table:table-cell table:style-name="ce372" table:formula="of:=IF([.A18]=0;0;(PPMT([.$C$3];[.A18];[.$C$4];-[.$C$2])))" office:value-type="string" office:string-value="" calcext:value-type="error">
            <text:p>Err:509</text:p>
          </table:table-cell>
          <table:table-cell table:style-name="ce372" table:formula="of:=IF([.A18]=0;0;(IPMT([.$C$3];[.A18];[.$C$4];-[.$C$2])))" office:value-type="string" office:string-value="" calcext:value-type="error">
            <text:p>Err:509</text:p>
          </table:table-cell>
          <table:table-cell table:style-name="ce372" table:formula="of:=IF([.A18]=0;0;(PMT([.$C$3];[.$C$4];-[.$C$2])))" office:value-type="string" office:string-value="" calcext:value-type="error">
            <text:p>Err:509</text:p>
          </table:table-cell>
          <table:table-cell table:style-name="ce372" table:formula="of:=IF([.A18]=0;0;([.$C$2]-[.F18]))" office:value-type="string" office:string-value="" calcext:value-type="error">
            <text:p>Err:509</text:p>
          </table:table-cell>
          <table:table-cell table:style-name="ce372" table:formula="of:=IF([.A18]=0;0;([.B18]+[.F17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8]&gt;=[.$C$4];0;IF([.A18]=0;0;(1+[.A18])))" office:value-type="float" office:value="9" calcext:value-type="float">
            <text:p>9</text:p>
          </table:table-cell>
          <table:table-cell table:style-name="ce372" table:formula="of:=IF([.A19]=0;0;(PPMT([.$C$3];[.A19];[.$C$4];-[.$C$2])))" office:value-type="string" office:string-value="" calcext:value-type="error">
            <text:p>Err:509</text:p>
          </table:table-cell>
          <table:table-cell table:style-name="ce372" table:formula="of:=IF([.A19]=0;0;(IPMT([.$C$3];[.A19];[.$C$4];-[.$C$2])))" office:value-type="string" office:string-value="" calcext:value-type="error">
            <text:p>Err:509</text:p>
          </table:table-cell>
          <table:table-cell table:style-name="ce372" table:formula="of:=IF([.A19]=0;0;(PMT([.$C$3];[.$C$4];-[.$C$2])))" office:value-type="string" office:string-value="" calcext:value-type="error">
            <text:p>Err:509</text:p>
          </table:table-cell>
          <table:table-cell table:style-name="ce372" table:formula="of:=IF([.A19]=0;0;([.$C$2]-[.F19]))" office:value-type="string" office:string-value="" calcext:value-type="error">
            <text:p>Err:509</text:p>
          </table:table-cell>
          <table:table-cell table:style-name="ce372" table:formula="of:=IF([.A19]=0;0;([.B19]+[.F18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19]&gt;=[.$C$4];0;IF([.A19]=0;0;(1+[.A19])))" office:value-type="float" office:value="10" calcext:value-type="float">
            <text:p>10</text:p>
          </table:table-cell>
          <table:table-cell table:style-name="ce372" table:formula="of:=IF([.A20]=0;0;(PPMT([.$C$3];[.A20];[.$C$4];-[.$C$2])))" office:value-type="string" office:string-value="" calcext:value-type="error">
            <text:p>Err:509</text:p>
          </table:table-cell>
          <table:table-cell table:style-name="ce372" table:formula="of:=IF([.A20]=0;0;(IPMT([.$C$3];[.A20];[.$C$4];-[.$C$2])))" office:value-type="string" office:string-value="" calcext:value-type="error">
            <text:p>Err:509</text:p>
          </table:table-cell>
          <table:table-cell table:style-name="ce372" table:formula="of:=IF([.A20]=0;0;(PMT([.$C$3];[.$C$4];-[.$C$2])))" office:value-type="string" office:string-value="" calcext:value-type="error">
            <text:p>Err:509</text:p>
          </table:table-cell>
          <table:table-cell table:style-name="ce372" table:formula="of:=IF([.A20]=0;0;([.$C$2]-[.F20]))" office:value-type="string" office:string-value="" calcext:value-type="error">
            <text:p>Err:509</text:p>
          </table:table-cell>
          <table:table-cell table:style-name="ce372" table:formula="of:=IF([.A20]=0;0;([.B20]+[.F19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20]&gt;=[.$C$4];0;IF([.A20]=0;0;(1+[.A20])))" office:value-type="float" office:value="11" calcext:value-type="float">
            <text:p>11</text:p>
          </table:table-cell>
          <table:table-cell table:style-name="ce372" table:formula="of:=IF([.A21]=0;0;(PPMT([.$C$3];[.A21];[.$C$4];-[.$C$2])))" office:value-type="string" office:string-value="" calcext:value-type="error">
            <text:p>Err:509</text:p>
          </table:table-cell>
          <table:table-cell table:style-name="ce372" table:formula="of:=IF([.A21]=0;0;(IPMT([.$C$3];[.A21];[.$C$4];-[.$C$2])))" office:value-type="string" office:string-value="" calcext:value-type="error">
            <text:p>Err:509</text:p>
          </table:table-cell>
          <table:table-cell table:style-name="ce372" table:formula="of:=IF([.A21]=0;0;(PMT([.$C$3];[.$C$4];-[.$C$2])))" office:value-type="string" office:string-value="" calcext:value-type="error">
            <text:p>Err:509</text:p>
          </table:table-cell>
          <table:table-cell table:style-name="ce372" table:formula="of:=IF([.A21]=0;0;([.$C$2]-[.F21]))" office:value-type="string" office:string-value="" calcext:value-type="error">
            <text:p>Err:509</text:p>
          </table:table-cell>
          <table:table-cell table:style-name="ce372" table:formula="of:=IF([.A21]=0;0;([.B21]+[.F20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6" table:formula="of:=IF([.A21]&gt;=[.$C$4];0;IF([.A21]=0;0;(1+[.A21])))" office:value-type="float" office:value="12" calcext:value-type="float">
            <text:p>12</text:p>
          </table:table-cell>
          <table:table-cell table:style-name="ce372" table:formula="of:=IF([.A22]=0;0;(PPMT([.$C$3];[.A22];[.$C$4];-[.$C$2])))" office:value-type="string" office:string-value="" calcext:value-type="error">
            <text:p>Err:509</text:p>
          </table:table-cell>
          <table:table-cell table:style-name="ce372" table:formula="of:=IF([.A22]=0;0;(IPMT([.$C$3];[.A22];[.$C$4];-[.$C$2])))" office:value-type="string" office:string-value="" calcext:value-type="error">
            <text:p>Err:509</text:p>
          </table:table-cell>
          <table:table-cell table:style-name="ce372" table:formula="of:=IF([.A22]=0;0;(PMT([.$C$3];[.$C$4];-[.$C$2])))" office:value-type="string" office:string-value="" calcext:value-type="error">
            <text:p>Err:509</text:p>
          </table:table-cell>
          <table:table-cell table:style-name="ce372" table:formula="of:=IF([.A22]=0;0;([.$C$2]-[.F22]))" office:value-type="string" office:string-value="" calcext:value-type="error">
            <text:p>Err:509</text:p>
          </table:table-cell>
          <table:table-cell table:style-name="ce372" table:formula="of:=IF([.A22]=0;0;([.B22]+[.F21]))" office:value-type="string" office:string-value="" calcext:value-type="error">
            <text:p>Err:509</text:p>
          </table:table-cell>
          <table:table-cell table:number-columns-repeated="16378"/>
        </table:table-row>
        <table:table-row table:style-name="ro1">
          <table:table-cell table:style-name="ce367" table:formula="of:=IF([.A22]&gt;=[.$C$4];0;IF([.A22]=0;0;(1+[.A22])))" office:value-type="float" office:value="0" calcext:value-type="float">
            <text:p>0</text:p>
          </table:table-cell>
          <table:table-cell table:style-name="ce373" table:formula="of:=IF([.A23]=0;0;(PPMT([.$C$3];[.A23];[.$C$4];-[.$C$2])))" office:value-type="float" office:value="0" calcext:value-type="float">
            <text:p>0.00</text:p>
          </table:table-cell>
          <table:table-cell table:style-name="ce373" table:formula="of:=IF([.A23]=0;0;(IPMT([.$C$3];[.A23];[.$C$4];-[.$C$2])))" office:value-type="float" office:value="0" calcext:value-type="float">
            <text:p>0.00</text:p>
          </table:table-cell>
          <table:table-cell table:style-name="ce373" table:formula="of:=IF([.A23]=0;0;(PMT([.$C$3];[.$C$4];-[.$C$2])))" office:value-type="float" office:value="0" calcext:value-type="float">
            <text:p>0.00</text:p>
          </table:table-cell>
          <table:table-cell table:style-name="ce373" table:formula="of:=IF([.A23]=0;0;([.$C$2]-[.F23]))" office:value-type="float" office:value="0" calcext:value-type="float">
            <text:p>0.00</text:p>
          </table:table-cell>
          <table:table-cell table:style-name="ce373" table:formula="of:=IF([.A23]=0;0;([.B23]+[.F2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]&gt;=[.$C$4];0;IF([.A23]=0;0;(1+[.A23])))" office:value-type="float" office:value="0" calcext:value-type="float">
            <text:p>0</text:p>
          </table:table-cell>
          <table:table-cell table:style-name="ce373" table:formula="of:=IF([.A24]=0;0;(PPMT([.$C$3];[.A24];[.$C$4];-[.$C$2])))" office:value-type="float" office:value="0" calcext:value-type="float">
            <text:p>0.00</text:p>
          </table:table-cell>
          <table:table-cell table:style-name="ce373" table:formula="of:=IF([.A24]=0;0;(IPMT([.$C$3];[.A24];[.$C$4];-[.$C$2])))" office:value-type="float" office:value="0" calcext:value-type="float">
            <text:p>0.00</text:p>
          </table:table-cell>
          <table:table-cell table:style-name="ce373" table:formula="of:=IF([.A24]=0;0;(PMT([.$C$3];[.$C$4];-[.$C$2])))" office:value-type="float" office:value="0" calcext:value-type="float">
            <text:p>0.00</text:p>
          </table:table-cell>
          <table:table-cell table:style-name="ce373" table:formula="of:=IF([.A24]=0;0;([.$C$2]-[.F24]))" office:value-type="float" office:value="0" calcext:value-type="float">
            <text:p>0.00</text:p>
          </table:table-cell>
          <table:table-cell table:style-name="ce373" table:formula="of:=IF([.A24]=0;0;([.B24]+[.F2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]&gt;=[.$C$4];0;IF([.A24]=0;0;(1+[.A24])))" office:value-type="float" office:value="0" calcext:value-type="float">
            <text:p>0</text:p>
          </table:table-cell>
          <table:table-cell table:style-name="ce373" table:formula="of:=IF([.A25]=0;0;(PPMT([.$C$3];[.A25];[.$C$4];-[.$C$2])))" office:value-type="float" office:value="0" calcext:value-type="float">
            <text:p>0.00</text:p>
          </table:table-cell>
          <table:table-cell table:style-name="ce373" table:formula="of:=IF([.A25]=0;0;(IPMT([.$C$3];[.A25];[.$C$4];-[.$C$2])))" office:value-type="float" office:value="0" calcext:value-type="float">
            <text:p>0.00</text:p>
          </table:table-cell>
          <table:table-cell table:style-name="ce373" table:formula="of:=IF([.A25]=0;0;(PMT([.$C$3];[.$C$4];-[.$C$2])))" office:value-type="float" office:value="0" calcext:value-type="float">
            <text:p>0.00</text:p>
          </table:table-cell>
          <table:table-cell table:style-name="ce373" table:formula="of:=IF([.A25]=0;0;([.$C$2]-[.F25]))" office:value-type="float" office:value="0" calcext:value-type="float">
            <text:p>0.00</text:p>
          </table:table-cell>
          <table:table-cell table:style-name="ce373" table:formula="of:=IF([.A25]=0;0;([.B25]+[.F2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]&gt;=[.$C$4];0;IF([.A25]=0;0;(1+[.A25])))" office:value-type="float" office:value="0" calcext:value-type="float">
            <text:p>0</text:p>
          </table:table-cell>
          <table:table-cell table:style-name="ce373" table:formula="of:=IF([.A26]=0;0;(PPMT([.$C$3];[.A26];[.$C$4];-[.$C$2])))" office:value-type="float" office:value="0" calcext:value-type="float">
            <text:p>0.00</text:p>
          </table:table-cell>
          <table:table-cell table:style-name="ce373" table:formula="of:=IF([.A26]=0;0;(IPMT([.$C$3];[.A26];[.$C$4];-[.$C$2])))" office:value-type="float" office:value="0" calcext:value-type="float">
            <text:p>0.00</text:p>
          </table:table-cell>
          <table:table-cell table:style-name="ce373" table:formula="of:=IF([.A26]=0;0;(PMT([.$C$3];[.$C$4];-[.$C$2])))" office:value-type="float" office:value="0" calcext:value-type="float">
            <text:p>0.00</text:p>
          </table:table-cell>
          <table:table-cell table:style-name="ce373" table:formula="of:=IF([.A26]=0;0;([.$C$2]-[.F26]))" office:value-type="float" office:value="0" calcext:value-type="float">
            <text:p>0.00</text:p>
          </table:table-cell>
          <table:table-cell table:style-name="ce373" table:formula="of:=IF([.A26]=0;0;([.B26]+[.F2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]&gt;=[.$C$4];0;IF([.A26]=0;0;(1+[.A26])))" office:value-type="float" office:value="0" calcext:value-type="float">
            <text:p>0</text:p>
          </table:table-cell>
          <table:table-cell table:style-name="ce373" table:formula="of:=IF([.A27]=0;0;(PPMT([.$C$3];[.A27];[.$C$4];-[.$C$2])))" office:value-type="float" office:value="0" calcext:value-type="float">
            <text:p>0.00</text:p>
          </table:table-cell>
          <table:table-cell table:style-name="ce373" table:formula="of:=IF([.A27]=0;0;(IPMT([.$C$3];[.A27];[.$C$4];-[.$C$2])))" office:value-type="float" office:value="0" calcext:value-type="float">
            <text:p>0.00</text:p>
          </table:table-cell>
          <table:table-cell table:style-name="ce373" table:formula="of:=IF([.A27]=0;0;(PMT([.$C$3];[.$C$4];-[.$C$2])))" office:value-type="float" office:value="0" calcext:value-type="float">
            <text:p>0.00</text:p>
          </table:table-cell>
          <table:table-cell table:style-name="ce373" table:formula="of:=IF([.A27]=0;0;([.$C$2]-[.F27]))" office:value-type="float" office:value="0" calcext:value-type="float">
            <text:p>0.00</text:p>
          </table:table-cell>
          <table:table-cell table:style-name="ce373" table:formula="of:=IF([.A27]=0;0;([.B27]+[.F2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]&gt;=[.$C$4];0;IF([.A27]=0;0;(1+[.A27])))" office:value-type="float" office:value="0" calcext:value-type="float">
            <text:p>0</text:p>
          </table:table-cell>
          <table:table-cell table:style-name="ce373" table:formula="of:=IF([.A28]=0;0;(PPMT([.$C$3];[.A28];[.$C$4];-[.$C$2])))" office:value-type="float" office:value="0" calcext:value-type="float">
            <text:p>0.00</text:p>
          </table:table-cell>
          <table:table-cell table:style-name="ce373" table:formula="of:=IF([.A28]=0;0;(IPMT([.$C$3];[.A28];[.$C$4];-[.$C$2])))" office:value-type="float" office:value="0" calcext:value-type="float">
            <text:p>0.00</text:p>
          </table:table-cell>
          <table:table-cell table:style-name="ce373" table:formula="of:=IF([.A28]=0;0;(PMT([.$C$3];[.$C$4];-[.$C$2])))" office:value-type="float" office:value="0" calcext:value-type="float">
            <text:p>0.00</text:p>
          </table:table-cell>
          <table:table-cell table:style-name="ce373" table:formula="of:=IF([.A28]=0;0;([.$C$2]-[.F28]))" office:value-type="float" office:value="0" calcext:value-type="float">
            <text:p>0.00</text:p>
          </table:table-cell>
          <table:table-cell table:style-name="ce373" table:formula="of:=IF([.A28]=0;0;([.B28]+[.F2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]&gt;=[.$C$4];0;IF([.A28]=0;0;(1+[.A28])))" office:value-type="float" office:value="0" calcext:value-type="float">
            <text:p>0</text:p>
          </table:table-cell>
          <table:table-cell table:style-name="ce373" table:formula="of:=IF([.A29]=0;0;(PPMT([.$C$3];[.A29];[.$C$4];-[.$C$2])))" office:value-type="float" office:value="0" calcext:value-type="float">
            <text:p>0.00</text:p>
          </table:table-cell>
          <table:table-cell table:style-name="ce373" table:formula="of:=IF([.A29]=0;0;(IPMT([.$C$3];[.A29];[.$C$4];-[.$C$2])))" office:value-type="float" office:value="0" calcext:value-type="float">
            <text:p>0.00</text:p>
          </table:table-cell>
          <table:table-cell table:style-name="ce373" table:formula="of:=IF([.A29]=0;0;(PMT([.$C$3];[.$C$4];-[.$C$2])))" office:value-type="float" office:value="0" calcext:value-type="float">
            <text:p>0.00</text:p>
          </table:table-cell>
          <table:table-cell table:style-name="ce373" table:formula="of:=IF([.A29]=0;0;([.$C$2]-[.F29]))" office:value-type="float" office:value="0" calcext:value-type="float">
            <text:p>0.00</text:p>
          </table:table-cell>
          <table:table-cell table:style-name="ce373" table:formula="of:=IF([.A29]=0;0;([.B29]+[.F2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]&gt;=[.$C$4];0;IF([.A29]=0;0;(1+[.A29])))" office:value-type="float" office:value="0" calcext:value-type="float">
            <text:p>0</text:p>
          </table:table-cell>
          <table:table-cell table:style-name="ce373" table:formula="of:=IF([.A30]=0;0;(PPMT([.$C$3];[.A30];[.$C$4];-[.$C$2])))" office:value-type="float" office:value="0" calcext:value-type="float">
            <text:p>0.00</text:p>
          </table:table-cell>
          <table:table-cell table:style-name="ce373" table:formula="of:=IF([.A30]=0;0;(IPMT([.$C$3];[.A30];[.$C$4];-[.$C$2])))" office:value-type="float" office:value="0" calcext:value-type="float">
            <text:p>0.00</text:p>
          </table:table-cell>
          <table:table-cell table:style-name="ce373" table:formula="of:=IF([.A30]=0;0;(PMT([.$C$3];[.$C$4];-[.$C$2])))" office:value-type="float" office:value="0" calcext:value-type="float">
            <text:p>0.00</text:p>
          </table:table-cell>
          <table:table-cell table:style-name="ce373" table:formula="of:=IF([.A30]=0;0;([.$C$2]-[.F30]))" office:value-type="float" office:value="0" calcext:value-type="float">
            <text:p>0.00</text:p>
          </table:table-cell>
          <table:table-cell table:style-name="ce373" table:formula="of:=IF([.A30]=0;0;([.B30]+[.F2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]&gt;=[.$C$4];0;IF([.A30]=0;0;(1+[.A30])))" office:value-type="float" office:value="0" calcext:value-type="float">
            <text:p>0</text:p>
          </table:table-cell>
          <table:table-cell table:style-name="ce373" table:formula="of:=IF([.A31]=0;0;(PPMT([.$C$3];[.A31];[.$C$4];-[.$C$2])))" office:value-type="float" office:value="0" calcext:value-type="float">
            <text:p>0.00</text:p>
          </table:table-cell>
          <table:table-cell table:style-name="ce373" table:formula="of:=IF([.A31]=0;0;(IPMT([.$C$3];[.A31];[.$C$4];-[.$C$2])))" office:value-type="float" office:value="0" calcext:value-type="float">
            <text:p>0.00</text:p>
          </table:table-cell>
          <table:table-cell table:style-name="ce373" table:formula="of:=IF([.A31]=0;0;(PMT([.$C$3];[.$C$4];-[.$C$2])))" office:value-type="float" office:value="0" calcext:value-type="float">
            <text:p>0.00</text:p>
          </table:table-cell>
          <table:table-cell table:style-name="ce373" table:formula="of:=IF([.A31]=0;0;([.$C$2]-[.F31]))" office:value-type="float" office:value="0" calcext:value-type="float">
            <text:p>0.00</text:p>
          </table:table-cell>
          <table:table-cell table:style-name="ce373" table:formula="of:=IF([.A31]=0;0;([.B31]+[.F3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]&gt;=[.$C$4];0;IF([.A31]=0;0;(1+[.A31])))" office:value-type="float" office:value="0" calcext:value-type="float">
            <text:p>0</text:p>
          </table:table-cell>
          <table:table-cell table:style-name="ce373" table:formula="of:=IF([.A32]=0;0;(PPMT([.$C$3];[.A32];[.$C$4];-[.$C$2])))" office:value-type="float" office:value="0" calcext:value-type="float">
            <text:p>0.00</text:p>
          </table:table-cell>
          <table:table-cell table:style-name="ce373" table:formula="of:=IF([.A32]=0;0;(IPMT([.$C$3];[.A32];[.$C$4];-[.$C$2])))" office:value-type="float" office:value="0" calcext:value-type="float">
            <text:p>0.00</text:p>
          </table:table-cell>
          <table:table-cell table:style-name="ce373" table:formula="of:=IF([.A32]=0;0;(PMT([.$C$3];[.$C$4];-[.$C$2])))" office:value-type="float" office:value="0" calcext:value-type="float">
            <text:p>0.00</text:p>
          </table:table-cell>
          <table:table-cell table:style-name="ce373" table:formula="of:=IF([.A32]=0;0;([.$C$2]-[.F32]))" office:value-type="float" office:value="0" calcext:value-type="float">
            <text:p>0.00</text:p>
          </table:table-cell>
          <table:table-cell table:style-name="ce373" table:formula="of:=IF([.A32]=0;0;([.B32]+[.F3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]&gt;=[.$C$4];0;IF([.A32]=0;0;(1+[.A32])))" office:value-type="float" office:value="0" calcext:value-type="float">
            <text:p>0</text:p>
          </table:table-cell>
          <table:table-cell table:style-name="ce373" table:formula="of:=IF([.A33]=0;0;(PPMT([.$C$3];[.A33];[.$C$4];-[.$C$2])))" office:value-type="float" office:value="0" calcext:value-type="float">
            <text:p>0.00</text:p>
          </table:table-cell>
          <table:table-cell table:style-name="ce373" table:formula="of:=IF([.A33]=0;0;(IPMT([.$C$3];[.A33];[.$C$4];-[.$C$2])))" office:value-type="float" office:value="0" calcext:value-type="float">
            <text:p>0.00</text:p>
          </table:table-cell>
          <table:table-cell table:style-name="ce373" table:formula="of:=IF([.A33]=0;0;(PMT([.$C$3];[.$C$4];-[.$C$2])))" office:value-type="float" office:value="0" calcext:value-type="float">
            <text:p>0.00</text:p>
          </table:table-cell>
          <table:table-cell table:style-name="ce373" table:formula="of:=IF([.A33]=0;0;([.$C$2]-[.F33]))" office:value-type="float" office:value="0" calcext:value-type="float">
            <text:p>0.00</text:p>
          </table:table-cell>
          <table:table-cell table:style-name="ce373" table:formula="of:=IF([.A33]=0;0;([.B33]+[.F3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]&gt;=[.$C$4];0;IF([.A33]=0;0;(1+[.A33])))" office:value-type="float" office:value="0" calcext:value-type="float">
            <text:p>0</text:p>
          </table:table-cell>
          <table:table-cell table:style-name="ce373" table:formula="of:=IF([.A34]=0;0;(PPMT([.$C$3];[.A34];[.$C$4];-[.$C$2])))" office:value-type="float" office:value="0" calcext:value-type="float">
            <text:p>0.00</text:p>
          </table:table-cell>
          <table:table-cell table:style-name="ce373" table:formula="of:=IF([.A34]=0;0;(IPMT([.$C$3];[.A34];[.$C$4];-[.$C$2])))" office:value-type="float" office:value="0" calcext:value-type="float">
            <text:p>0.00</text:p>
          </table:table-cell>
          <table:table-cell table:style-name="ce373" table:formula="of:=IF([.A34]=0;0;(PMT([.$C$3];[.$C$4];-[.$C$2])))" office:value-type="float" office:value="0" calcext:value-type="float">
            <text:p>0.00</text:p>
          </table:table-cell>
          <table:table-cell table:style-name="ce373" table:formula="of:=IF([.A34]=0;0;([.$C$2]-[.F34]))" office:value-type="float" office:value="0" calcext:value-type="float">
            <text:p>0.00</text:p>
          </table:table-cell>
          <table:table-cell table:style-name="ce373" table:formula="of:=IF([.A34]=0;0;([.B34]+[.F3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]&gt;=[.$C$4];0;IF([.A34]=0;0;(1+[.A34])))" office:value-type="float" office:value="0" calcext:value-type="float">
            <text:p>0</text:p>
          </table:table-cell>
          <table:table-cell table:style-name="ce373" table:formula="of:=IF([.A35]=0;0;(PPMT([.$C$3];[.A35];[.$C$4];-[.$C$2])))" office:value-type="float" office:value="0" calcext:value-type="float">
            <text:p>0.00</text:p>
          </table:table-cell>
          <table:table-cell table:style-name="ce373" table:formula="of:=IF([.A35]=0;0;(IPMT([.$C$3];[.A35];[.$C$4];-[.$C$2])))" office:value-type="float" office:value="0" calcext:value-type="float">
            <text:p>0.00</text:p>
          </table:table-cell>
          <table:table-cell table:style-name="ce373" table:formula="of:=IF([.A35]=0;0;(PMT([.$C$3];[.$C$4];-[.$C$2])))" office:value-type="float" office:value="0" calcext:value-type="float">
            <text:p>0.00</text:p>
          </table:table-cell>
          <table:table-cell table:style-name="ce373" table:formula="of:=IF([.A35]=0;0;([.$C$2]-[.F35]))" office:value-type="float" office:value="0" calcext:value-type="float">
            <text:p>0.00</text:p>
          </table:table-cell>
          <table:table-cell table:style-name="ce373" table:formula="of:=IF([.A35]=0;0;([.B35]+[.F3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]&gt;=[.$C$4];0;IF([.A35]=0;0;(1+[.A35])))" office:value-type="float" office:value="0" calcext:value-type="float">
            <text:p>0</text:p>
          </table:table-cell>
          <table:table-cell table:style-name="ce373" table:formula="of:=IF([.A36]=0;0;(PPMT([.$C$3];[.A36];[.$C$4];-[.$C$2])))" office:value-type="float" office:value="0" calcext:value-type="float">
            <text:p>0.00</text:p>
          </table:table-cell>
          <table:table-cell table:style-name="ce373" table:formula="of:=IF([.A36]=0;0;(IPMT([.$C$3];[.A36];[.$C$4];-[.$C$2])))" office:value-type="float" office:value="0" calcext:value-type="float">
            <text:p>0.00</text:p>
          </table:table-cell>
          <table:table-cell table:style-name="ce373" table:formula="of:=IF([.A36]=0;0;(PMT([.$C$3];[.$C$4];-[.$C$2])))" office:value-type="float" office:value="0" calcext:value-type="float">
            <text:p>0.00</text:p>
          </table:table-cell>
          <table:table-cell table:style-name="ce373" table:formula="of:=IF([.A36]=0;0;([.$C$2]-[.F36]))" office:value-type="float" office:value="0" calcext:value-type="float">
            <text:p>0.00</text:p>
          </table:table-cell>
          <table:table-cell table:style-name="ce373" table:formula="of:=IF([.A36]=0;0;([.B36]+[.F3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]&gt;=[.$C$4];0;IF([.A36]=0;0;(1+[.A36])))" office:value-type="float" office:value="0" calcext:value-type="float">
            <text:p>0</text:p>
          </table:table-cell>
          <table:table-cell table:style-name="ce373" table:formula="of:=IF([.A37]=0;0;(PPMT([.$C$3];[.A37];[.$C$4];-[.$C$2])))" office:value-type="float" office:value="0" calcext:value-type="float">
            <text:p>0.00</text:p>
          </table:table-cell>
          <table:table-cell table:style-name="ce373" table:formula="of:=IF([.A37]=0;0;(IPMT([.$C$3];[.A37];[.$C$4];-[.$C$2])))" office:value-type="float" office:value="0" calcext:value-type="float">
            <text:p>0.00</text:p>
          </table:table-cell>
          <table:table-cell table:style-name="ce373" table:formula="of:=IF([.A37]=0;0;(PMT([.$C$3];[.$C$4];-[.$C$2])))" office:value-type="float" office:value="0" calcext:value-type="float">
            <text:p>0.00</text:p>
          </table:table-cell>
          <table:table-cell table:style-name="ce373" table:formula="of:=IF([.A37]=0;0;([.$C$2]-[.F37]))" office:value-type="float" office:value="0" calcext:value-type="float">
            <text:p>0.00</text:p>
          </table:table-cell>
          <table:table-cell table:style-name="ce373" table:formula="of:=IF([.A37]=0;0;([.B37]+[.F3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7]&gt;=[.$C$4];0;IF([.A37]=0;0;(1+[.A37])))" office:value-type="float" office:value="0" calcext:value-type="float">
            <text:p>0</text:p>
          </table:table-cell>
          <table:table-cell table:style-name="ce373" table:formula="of:=IF([.A38]=0;0;(PPMT([.$C$3];[.A38];[.$C$4];-[.$C$2])))" office:value-type="float" office:value="0" calcext:value-type="float">
            <text:p>0.00</text:p>
          </table:table-cell>
          <table:table-cell table:style-name="ce373" table:formula="of:=IF([.A38]=0;0;(IPMT([.$C$3];[.A38];[.$C$4];-[.$C$2])))" office:value-type="float" office:value="0" calcext:value-type="float">
            <text:p>0.00</text:p>
          </table:table-cell>
          <table:table-cell table:style-name="ce373" table:formula="of:=IF([.A38]=0;0;(PMT([.$C$3];[.$C$4];-[.$C$2])))" office:value-type="float" office:value="0" calcext:value-type="float">
            <text:p>0.00</text:p>
          </table:table-cell>
          <table:table-cell table:style-name="ce373" table:formula="of:=IF([.A38]=0;0;([.$C$2]-[.F38]))" office:value-type="float" office:value="0" calcext:value-type="float">
            <text:p>0.00</text:p>
          </table:table-cell>
          <table:table-cell table:style-name="ce373" table:formula="of:=IF([.A38]=0;0;([.B38]+[.F3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8]&gt;=[.$C$4];0;IF([.A38]=0;0;(1+[.A38])))" office:value-type="float" office:value="0" calcext:value-type="float">
            <text:p>0</text:p>
          </table:table-cell>
          <table:table-cell table:style-name="ce373" table:formula="of:=IF([.A39]=0;0;(PPMT([.$C$3];[.A39];[.$C$4];-[.$C$2])))" office:value-type="float" office:value="0" calcext:value-type="float">
            <text:p>0.00</text:p>
          </table:table-cell>
          <table:table-cell table:style-name="ce373" table:formula="of:=IF([.A39]=0;0;(IPMT([.$C$3];[.A39];[.$C$4];-[.$C$2])))" office:value-type="float" office:value="0" calcext:value-type="float">
            <text:p>0.00</text:p>
          </table:table-cell>
          <table:table-cell table:style-name="ce373" table:formula="of:=IF([.A39]=0;0;(PMT([.$C$3];[.$C$4];-[.$C$2])))" office:value-type="float" office:value="0" calcext:value-type="float">
            <text:p>0.00</text:p>
          </table:table-cell>
          <table:table-cell table:style-name="ce373" table:formula="of:=IF([.A39]=0;0;([.$C$2]-[.F39]))" office:value-type="float" office:value="0" calcext:value-type="float">
            <text:p>0.00</text:p>
          </table:table-cell>
          <table:table-cell table:style-name="ce373" table:formula="of:=IF([.A39]=0;0;([.B39]+[.F3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9]&gt;=[.$C$4];0;IF([.A39]=0;0;(1+[.A39])))" office:value-type="float" office:value="0" calcext:value-type="float">
            <text:p>0</text:p>
          </table:table-cell>
          <table:table-cell table:style-name="ce373" table:formula="of:=IF([.A40]=0;0;(PPMT([.$C$3];[.A40];[.$C$4];-[.$C$2])))" office:value-type="float" office:value="0" calcext:value-type="float">
            <text:p>0.00</text:p>
          </table:table-cell>
          <table:table-cell table:style-name="ce373" table:formula="of:=IF([.A40]=0;0;(IPMT([.$C$3];[.A40];[.$C$4];-[.$C$2])))" office:value-type="float" office:value="0" calcext:value-type="float">
            <text:p>0.00</text:p>
          </table:table-cell>
          <table:table-cell table:style-name="ce373" table:formula="of:=IF([.A40]=0;0;(PMT([.$C$3];[.$C$4];-[.$C$2])))" office:value-type="float" office:value="0" calcext:value-type="float">
            <text:p>0.00</text:p>
          </table:table-cell>
          <table:table-cell table:style-name="ce373" table:formula="of:=IF([.A40]=0;0;([.$C$2]-[.F40]))" office:value-type="float" office:value="0" calcext:value-type="float">
            <text:p>0.00</text:p>
          </table:table-cell>
          <table:table-cell table:style-name="ce373" table:formula="of:=IF([.A40]=0;0;([.B40]+[.F3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0]&gt;=[.$C$4];0;IF([.A40]=0;0;(1+[.A40])))" office:value-type="float" office:value="0" calcext:value-type="float">
            <text:p>0</text:p>
          </table:table-cell>
          <table:table-cell table:style-name="ce373" table:formula="of:=IF([.A41]=0;0;(PPMT([.$C$3];[.A41];[.$C$4];-[.$C$2])))" office:value-type="float" office:value="0" calcext:value-type="float">
            <text:p>0.00</text:p>
          </table:table-cell>
          <table:table-cell table:style-name="ce373" table:formula="of:=IF([.A41]=0;0;(IPMT([.$C$3];[.A41];[.$C$4];-[.$C$2])))" office:value-type="float" office:value="0" calcext:value-type="float">
            <text:p>0.00</text:p>
          </table:table-cell>
          <table:table-cell table:style-name="ce373" table:formula="of:=IF([.A41]=0;0;(PMT([.$C$3];[.$C$4];-[.$C$2])))" office:value-type="float" office:value="0" calcext:value-type="float">
            <text:p>0.00</text:p>
          </table:table-cell>
          <table:table-cell table:style-name="ce373" table:formula="of:=IF([.A41]=0;0;([.$C$2]-[.F41]))" office:value-type="float" office:value="0" calcext:value-type="float">
            <text:p>0.00</text:p>
          </table:table-cell>
          <table:table-cell table:style-name="ce373" table:formula="of:=IF([.A41]=0;0;([.B41]+[.F4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1]&gt;=[.$C$4];0;IF([.A41]=0;0;(1+[.A41])))" office:value-type="float" office:value="0" calcext:value-type="float">
            <text:p>0</text:p>
          </table:table-cell>
          <table:table-cell table:style-name="ce373" table:formula="of:=IF([.A42]=0;0;(PPMT([.$C$3];[.A42];[.$C$4];-[.$C$2])))" office:value-type="float" office:value="0" calcext:value-type="float">
            <text:p>0.00</text:p>
          </table:table-cell>
          <table:table-cell table:style-name="ce373" table:formula="of:=IF([.A42]=0;0;(IPMT([.$C$3];[.A42];[.$C$4];-[.$C$2])))" office:value-type="float" office:value="0" calcext:value-type="float">
            <text:p>0.00</text:p>
          </table:table-cell>
          <table:table-cell table:style-name="ce373" table:formula="of:=IF([.A42]=0;0;(PMT([.$C$3];[.$C$4];-[.$C$2])))" office:value-type="float" office:value="0" calcext:value-type="float">
            <text:p>0.00</text:p>
          </table:table-cell>
          <table:table-cell table:style-name="ce373" table:formula="of:=IF([.A42]=0;0;([.$C$2]-[.F42]))" office:value-type="float" office:value="0" calcext:value-type="float">
            <text:p>0.00</text:p>
          </table:table-cell>
          <table:table-cell table:style-name="ce373" table:formula="of:=IF([.A42]=0;0;([.B42]+[.F4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2]&gt;=[.$C$4];0;IF([.A42]=0;0;(1+[.A42])))" office:value-type="float" office:value="0" calcext:value-type="float">
            <text:p>0</text:p>
          </table:table-cell>
          <table:table-cell table:style-name="ce373" table:formula="of:=IF([.A43]=0;0;(PPMT([.$C$3];[.A43];[.$C$4];-[.$C$2])))" office:value-type="float" office:value="0" calcext:value-type="float">
            <text:p>0.00</text:p>
          </table:table-cell>
          <table:table-cell table:style-name="ce373" table:formula="of:=IF([.A43]=0;0;(IPMT([.$C$3];[.A43];[.$C$4];-[.$C$2])))" office:value-type="float" office:value="0" calcext:value-type="float">
            <text:p>0.00</text:p>
          </table:table-cell>
          <table:table-cell table:style-name="ce373" table:formula="of:=IF([.A43]=0;0;(PMT([.$C$3];[.$C$4];-[.$C$2])))" office:value-type="float" office:value="0" calcext:value-type="float">
            <text:p>0.00</text:p>
          </table:table-cell>
          <table:table-cell table:style-name="ce373" table:formula="of:=IF([.A43]=0;0;([.$C$2]-[.F43]))" office:value-type="float" office:value="0" calcext:value-type="float">
            <text:p>0.00</text:p>
          </table:table-cell>
          <table:table-cell table:style-name="ce373" table:formula="of:=IF([.A43]=0;0;([.B43]+[.F4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3]&gt;=[.$C$4];0;IF([.A43]=0;0;(1+[.A43])))" office:value-type="float" office:value="0" calcext:value-type="float">
            <text:p>0</text:p>
          </table:table-cell>
          <table:table-cell table:style-name="ce373" table:formula="of:=IF([.A44]=0;0;(PPMT([.$C$3];[.A44];[.$C$4];-[.$C$2])))" office:value-type="float" office:value="0" calcext:value-type="float">
            <text:p>0.00</text:p>
          </table:table-cell>
          <table:table-cell table:style-name="ce373" table:formula="of:=IF([.A44]=0;0;(IPMT([.$C$3];[.A44];[.$C$4];-[.$C$2])))" office:value-type="float" office:value="0" calcext:value-type="float">
            <text:p>0.00</text:p>
          </table:table-cell>
          <table:table-cell table:style-name="ce373" table:formula="of:=IF([.A44]=0;0;(PMT([.$C$3];[.$C$4];-[.$C$2])))" office:value-type="float" office:value="0" calcext:value-type="float">
            <text:p>0.00</text:p>
          </table:table-cell>
          <table:table-cell table:style-name="ce373" table:formula="of:=IF([.A44]=0;0;([.$C$2]-[.F44]))" office:value-type="float" office:value="0" calcext:value-type="float">
            <text:p>0.00</text:p>
          </table:table-cell>
          <table:table-cell table:style-name="ce373" table:formula="of:=IF([.A44]=0;0;([.B44]+[.F4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4]&gt;=[.$C$4];0;IF([.A44]=0;0;(1+[.A44])))" office:value-type="float" office:value="0" calcext:value-type="float">
            <text:p>0</text:p>
          </table:table-cell>
          <table:table-cell table:style-name="ce373" table:formula="of:=IF([.A45]=0;0;(PPMT([.$C$3];[.A45];[.$C$4];-[.$C$2])))" office:value-type="float" office:value="0" calcext:value-type="float">
            <text:p>0.00</text:p>
          </table:table-cell>
          <table:table-cell table:style-name="ce373" table:formula="of:=IF([.A45]=0;0;(IPMT([.$C$3];[.A45];[.$C$4];-[.$C$2])))" office:value-type="float" office:value="0" calcext:value-type="float">
            <text:p>0.00</text:p>
          </table:table-cell>
          <table:table-cell table:style-name="ce373" table:formula="of:=IF([.A45]=0;0;(PMT([.$C$3];[.$C$4];-[.$C$2])))" office:value-type="float" office:value="0" calcext:value-type="float">
            <text:p>0.00</text:p>
          </table:table-cell>
          <table:table-cell table:style-name="ce373" table:formula="of:=IF([.A45]=0;0;([.$C$2]-[.F45]))" office:value-type="float" office:value="0" calcext:value-type="float">
            <text:p>0.00</text:p>
          </table:table-cell>
          <table:table-cell table:style-name="ce373" table:formula="of:=IF([.A45]=0;0;([.B45]+[.F4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5]&gt;=[.$C$4];0;IF([.A45]=0;0;(1+[.A45])))" office:value-type="float" office:value="0" calcext:value-type="float">
            <text:p>0</text:p>
          </table:table-cell>
          <table:table-cell table:style-name="ce373" table:formula="of:=IF([.A46]=0;0;(PPMT([.$C$3];[.A46];[.$C$4];-[.$C$2])))" office:value-type="float" office:value="0" calcext:value-type="float">
            <text:p>0.00</text:p>
          </table:table-cell>
          <table:table-cell table:style-name="ce373" table:formula="of:=IF([.A46]=0;0;(IPMT([.$C$3];[.A46];[.$C$4];-[.$C$2])))" office:value-type="float" office:value="0" calcext:value-type="float">
            <text:p>0.00</text:p>
          </table:table-cell>
          <table:table-cell table:style-name="ce373" table:formula="of:=IF([.A46]=0;0;(PMT([.$C$3];[.$C$4];-[.$C$2])))" office:value-type="float" office:value="0" calcext:value-type="float">
            <text:p>0.00</text:p>
          </table:table-cell>
          <table:table-cell table:style-name="ce373" table:formula="of:=IF([.A46]=0;0;([.$C$2]-[.F46]))" office:value-type="float" office:value="0" calcext:value-type="float">
            <text:p>0.00</text:p>
          </table:table-cell>
          <table:table-cell table:style-name="ce373" table:formula="of:=IF([.A46]=0;0;([.B46]+[.F4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6]&gt;=[.$C$4];0;IF([.A46]=0;0;(1+[.A46])))" office:value-type="float" office:value="0" calcext:value-type="float">
            <text:p>0</text:p>
          </table:table-cell>
          <table:table-cell table:style-name="ce373" table:formula="of:=IF([.A47]=0;0;(PPMT([.$C$3];[.A47];[.$C$4];-[.$C$2])))" office:value-type="float" office:value="0" calcext:value-type="float">
            <text:p>0.00</text:p>
          </table:table-cell>
          <table:table-cell table:style-name="ce373" table:formula="of:=IF([.A47]=0;0;(IPMT([.$C$3];[.A47];[.$C$4];-[.$C$2])))" office:value-type="float" office:value="0" calcext:value-type="float">
            <text:p>0.00</text:p>
          </table:table-cell>
          <table:table-cell table:style-name="ce373" table:formula="of:=IF([.A47]=0;0;(PMT([.$C$3];[.$C$4];-[.$C$2])))" office:value-type="float" office:value="0" calcext:value-type="float">
            <text:p>0.00</text:p>
          </table:table-cell>
          <table:table-cell table:style-name="ce373" table:formula="of:=IF([.A47]=0;0;([.$C$2]-[.F47]))" office:value-type="float" office:value="0" calcext:value-type="float">
            <text:p>0.00</text:p>
          </table:table-cell>
          <table:table-cell table:style-name="ce373" table:formula="of:=IF([.A47]=0;0;([.B47]+[.F4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7]&gt;=[.$C$4];0;IF([.A47]=0;0;(1+[.A47])))" office:value-type="float" office:value="0" calcext:value-type="float">
            <text:p>0</text:p>
          </table:table-cell>
          <table:table-cell table:style-name="ce373" table:formula="of:=IF([.A48]=0;0;(PPMT([.$C$3];[.A48];[.$C$4];-[.$C$2])))" office:value-type="float" office:value="0" calcext:value-type="float">
            <text:p>0.00</text:p>
          </table:table-cell>
          <table:table-cell table:style-name="ce373" table:formula="of:=IF([.A48]=0;0;(IPMT([.$C$3];[.A48];[.$C$4];-[.$C$2])))" office:value-type="float" office:value="0" calcext:value-type="float">
            <text:p>0.00</text:p>
          </table:table-cell>
          <table:table-cell table:style-name="ce373" table:formula="of:=IF([.A48]=0;0;(PMT([.$C$3];[.$C$4];-[.$C$2])))" office:value-type="float" office:value="0" calcext:value-type="float">
            <text:p>0.00</text:p>
          </table:table-cell>
          <table:table-cell table:style-name="ce373" table:formula="of:=IF([.A48]=0;0;([.$C$2]-[.F48]))" office:value-type="float" office:value="0" calcext:value-type="float">
            <text:p>0.00</text:p>
          </table:table-cell>
          <table:table-cell table:style-name="ce373" table:formula="of:=IF([.A48]=0;0;([.B48]+[.F4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8]&gt;=[.$C$4];0;IF([.A48]=0;0;(1+[.A48])))" office:value-type="float" office:value="0" calcext:value-type="float">
            <text:p>0</text:p>
          </table:table-cell>
          <table:table-cell table:style-name="ce373" table:formula="of:=IF([.A49]=0;0;(PPMT([.$C$3];[.A49];[.$C$4];-[.$C$2])))" office:value-type="float" office:value="0" calcext:value-type="float">
            <text:p>0.00</text:p>
          </table:table-cell>
          <table:table-cell table:style-name="ce373" table:formula="of:=IF([.A49]=0;0;(IPMT([.$C$3];[.A49];[.$C$4];-[.$C$2])))" office:value-type="float" office:value="0" calcext:value-type="float">
            <text:p>0.00</text:p>
          </table:table-cell>
          <table:table-cell table:style-name="ce373" table:formula="of:=IF([.A49]=0;0;(PMT([.$C$3];[.$C$4];-[.$C$2])))" office:value-type="float" office:value="0" calcext:value-type="float">
            <text:p>0.00</text:p>
          </table:table-cell>
          <table:table-cell table:style-name="ce373" table:formula="of:=IF([.A49]=0;0;([.$C$2]-[.F49]))" office:value-type="float" office:value="0" calcext:value-type="float">
            <text:p>0.00</text:p>
          </table:table-cell>
          <table:table-cell table:style-name="ce373" table:formula="of:=IF([.A49]=0;0;([.B49]+[.F4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49]&gt;=[.$C$4];0;IF([.A49]=0;0;(1+[.A49])))" office:value-type="float" office:value="0" calcext:value-type="float">
            <text:p>0</text:p>
          </table:table-cell>
          <table:table-cell table:style-name="ce373" table:formula="of:=IF([.A50]=0;0;(PPMT([.$C$3];[.A50];[.$C$4];-[.$C$2])))" office:value-type="float" office:value="0" calcext:value-type="float">
            <text:p>0.00</text:p>
          </table:table-cell>
          <table:table-cell table:style-name="ce373" table:formula="of:=IF([.A50]=0;0;(IPMT([.$C$3];[.A50];[.$C$4];-[.$C$2])))" office:value-type="float" office:value="0" calcext:value-type="float">
            <text:p>0.00</text:p>
          </table:table-cell>
          <table:table-cell table:style-name="ce373" table:formula="of:=IF([.A50]=0;0;(PMT([.$C$3];[.$C$4];-[.$C$2])))" office:value-type="float" office:value="0" calcext:value-type="float">
            <text:p>0.00</text:p>
          </table:table-cell>
          <table:table-cell table:style-name="ce373" table:formula="of:=IF([.A50]=0;0;([.$C$2]-[.F50]))" office:value-type="float" office:value="0" calcext:value-type="float">
            <text:p>0.00</text:p>
          </table:table-cell>
          <table:table-cell table:style-name="ce373" table:formula="of:=IF([.A50]=0;0;([.B50]+[.F4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0]&gt;=[.$C$4];0;IF([.A50]=0;0;(1+[.A50])))" office:value-type="float" office:value="0" calcext:value-type="float">
            <text:p>0</text:p>
          </table:table-cell>
          <table:table-cell table:style-name="ce373" table:formula="of:=IF([.A51]=0;0;(PPMT([.$C$3];[.A51];[.$C$4];-[.$C$2])))" office:value-type="float" office:value="0" calcext:value-type="float">
            <text:p>0.00</text:p>
          </table:table-cell>
          <table:table-cell table:style-name="ce373" table:formula="of:=IF([.A51]=0;0;(IPMT([.$C$3];[.A51];[.$C$4];-[.$C$2])))" office:value-type="float" office:value="0" calcext:value-type="float">
            <text:p>0.00</text:p>
          </table:table-cell>
          <table:table-cell table:style-name="ce373" table:formula="of:=IF([.A51]=0;0;(PMT([.$C$3];[.$C$4];-[.$C$2])))" office:value-type="float" office:value="0" calcext:value-type="float">
            <text:p>0.00</text:p>
          </table:table-cell>
          <table:table-cell table:style-name="ce373" table:formula="of:=IF([.A51]=0;0;([.$C$2]-[.F51]))" office:value-type="float" office:value="0" calcext:value-type="float">
            <text:p>0.00</text:p>
          </table:table-cell>
          <table:table-cell table:style-name="ce373" table:formula="of:=IF([.A51]=0;0;([.B51]+[.F5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1]&gt;=[.$C$4];0;IF([.A51]=0;0;(1+[.A51])))" office:value-type="float" office:value="0" calcext:value-type="float">
            <text:p>0</text:p>
          </table:table-cell>
          <table:table-cell table:style-name="ce373" table:formula="of:=IF([.A52]=0;0;(PPMT([.$C$3];[.A52];[.$C$4];-[.$C$2])))" office:value-type="float" office:value="0" calcext:value-type="float">
            <text:p>0.00</text:p>
          </table:table-cell>
          <table:table-cell table:style-name="ce373" table:formula="of:=IF([.A52]=0;0;(IPMT([.$C$3];[.A52];[.$C$4];-[.$C$2])))" office:value-type="float" office:value="0" calcext:value-type="float">
            <text:p>0.00</text:p>
          </table:table-cell>
          <table:table-cell table:style-name="ce373" table:formula="of:=IF([.A52]=0;0;(PMT([.$C$3];[.$C$4];-[.$C$2])))" office:value-type="float" office:value="0" calcext:value-type="float">
            <text:p>0.00</text:p>
          </table:table-cell>
          <table:table-cell table:style-name="ce373" table:formula="of:=IF([.A52]=0;0;([.$C$2]-[.F52]))" office:value-type="float" office:value="0" calcext:value-type="float">
            <text:p>0.00</text:p>
          </table:table-cell>
          <table:table-cell table:style-name="ce373" table:formula="of:=IF([.A52]=0;0;([.B52]+[.F5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2]&gt;=[.$C$4];0;IF([.A52]=0;0;(1+[.A52])))" office:value-type="float" office:value="0" calcext:value-type="float">
            <text:p>0</text:p>
          </table:table-cell>
          <table:table-cell table:style-name="ce373" table:formula="of:=IF([.A53]=0;0;(PPMT([.$C$3];[.A53];[.$C$4];-[.$C$2])))" office:value-type="float" office:value="0" calcext:value-type="float">
            <text:p>0.00</text:p>
          </table:table-cell>
          <table:table-cell table:style-name="ce373" table:formula="of:=IF([.A53]=0;0;(IPMT([.$C$3];[.A53];[.$C$4];-[.$C$2])))" office:value-type="float" office:value="0" calcext:value-type="float">
            <text:p>0.00</text:p>
          </table:table-cell>
          <table:table-cell table:style-name="ce373" table:formula="of:=IF([.A53]=0;0;(PMT([.$C$3];[.$C$4];-[.$C$2])))" office:value-type="float" office:value="0" calcext:value-type="float">
            <text:p>0.00</text:p>
          </table:table-cell>
          <table:table-cell table:style-name="ce373" table:formula="of:=IF([.A53]=0;0;([.$C$2]-[.F53]))" office:value-type="float" office:value="0" calcext:value-type="float">
            <text:p>0.00</text:p>
          </table:table-cell>
          <table:table-cell table:style-name="ce373" table:formula="of:=IF([.A53]=0;0;([.B53]+[.F5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3]&gt;=[.$C$4];0;IF([.A53]=0;0;(1+[.A53])))" office:value-type="float" office:value="0" calcext:value-type="float">
            <text:p>0</text:p>
          </table:table-cell>
          <table:table-cell table:style-name="ce373" table:formula="of:=IF([.A54]=0;0;(PPMT([.$C$3];[.A54];[.$C$4];-[.$C$2])))" office:value-type="float" office:value="0" calcext:value-type="float">
            <text:p>0.00</text:p>
          </table:table-cell>
          <table:table-cell table:style-name="ce373" table:formula="of:=IF([.A54]=0;0;(IPMT([.$C$3];[.A54];[.$C$4];-[.$C$2])))" office:value-type="float" office:value="0" calcext:value-type="float">
            <text:p>0.00</text:p>
          </table:table-cell>
          <table:table-cell table:style-name="ce373" table:formula="of:=IF([.A54]=0;0;(PMT([.$C$3];[.$C$4];-[.$C$2])))" office:value-type="float" office:value="0" calcext:value-type="float">
            <text:p>0.00</text:p>
          </table:table-cell>
          <table:table-cell table:style-name="ce373" table:formula="of:=IF([.A54]=0;0;([.$C$2]-[.F54]))" office:value-type="float" office:value="0" calcext:value-type="float">
            <text:p>0.00</text:p>
          </table:table-cell>
          <table:table-cell table:style-name="ce373" table:formula="of:=IF([.A54]=0;0;([.B54]+[.F5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4]&gt;=[.$C$4];0;IF([.A54]=0;0;(1+[.A54])))" office:value-type="float" office:value="0" calcext:value-type="float">
            <text:p>0</text:p>
          </table:table-cell>
          <table:table-cell table:style-name="ce373" table:formula="of:=IF([.A55]=0;0;(PPMT([.$C$3];[.A55];[.$C$4];-[.$C$2])))" office:value-type="float" office:value="0" calcext:value-type="float">
            <text:p>0.00</text:p>
          </table:table-cell>
          <table:table-cell table:style-name="ce373" table:formula="of:=IF([.A55]=0;0;(IPMT([.$C$3];[.A55];[.$C$4];-[.$C$2])))" office:value-type="float" office:value="0" calcext:value-type="float">
            <text:p>0.00</text:p>
          </table:table-cell>
          <table:table-cell table:style-name="ce373" table:formula="of:=IF([.A55]=0;0;(PMT([.$C$3];[.$C$4];-[.$C$2])))" office:value-type="float" office:value="0" calcext:value-type="float">
            <text:p>0.00</text:p>
          </table:table-cell>
          <table:table-cell table:style-name="ce373" table:formula="of:=IF([.A55]=0;0;([.$C$2]-[.F55]))" office:value-type="float" office:value="0" calcext:value-type="float">
            <text:p>0.00</text:p>
          </table:table-cell>
          <table:table-cell table:style-name="ce373" table:formula="of:=IF([.A55]=0;0;([.B55]+[.F5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5]&gt;=[.$C$4];0;IF([.A55]=0;0;(1+[.A55])))" office:value-type="float" office:value="0" calcext:value-type="float">
            <text:p>0</text:p>
          </table:table-cell>
          <table:table-cell table:style-name="ce373" table:formula="of:=IF([.A56]=0;0;(PPMT([.$C$3];[.A56];[.$C$4];-[.$C$2])))" office:value-type="float" office:value="0" calcext:value-type="float">
            <text:p>0.00</text:p>
          </table:table-cell>
          <table:table-cell table:style-name="ce373" table:formula="of:=IF([.A56]=0;0;(IPMT([.$C$3];[.A56];[.$C$4];-[.$C$2])))" office:value-type="float" office:value="0" calcext:value-type="float">
            <text:p>0.00</text:p>
          </table:table-cell>
          <table:table-cell table:style-name="ce373" table:formula="of:=IF([.A56]=0;0;(PMT([.$C$3];[.$C$4];-[.$C$2])))" office:value-type="float" office:value="0" calcext:value-type="float">
            <text:p>0.00</text:p>
          </table:table-cell>
          <table:table-cell table:style-name="ce373" table:formula="of:=IF([.A56]=0;0;([.$C$2]-[.F56]))" office:value-type="float" office:value="0" calcext:value-type="float">
            <text:p>0.00</text:p>
          </table:table-cell>
          <table:table-cell table:style-name="ce373" table:formula="of:=IF([.A56]=0;0;([.B56]+[.F5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6]&gt;=[.$C$4];0;IF([.A56]=0;0;(1+[.A56])))" office:value-type="float" office:value="0" calcext:value-type="float">
            <text:p>0</text:p>
          </table:table-cell>
          <table:table-cell table:style-name="ce373" table:formula="of:=IF([.A57]=0;0;(PPMT([.$C$3];[.A57];[.$C$4];-[.$C$2])))" office:value-type="float" office:value="0" calcext:value-type="float">
            <text:p>0.00</text:p>
          </table:table-cell>
          <table:table-cell table:style-name="ce373" table:formula="of:=IF([.A57]=0;0;(IPMT([.$C$3];[.A57];[.$C$4];-[.$C$2])))" office:value-type="float" office:value="0" calcext:value-type="float">
            <text:p>0.00</text:p>
          </table:table-cell>
          <table:table-cell table:style-name="ce373" table:formula="of:=IF([.A57]=0;0;(PMT([.$C$3];[.$C$4];-[.$C$2])))" office:value-type="float" office:value="0" calcext:value-type="float">
            <text:p>0.00</text:p>
          </table:table-cell>
          <table:table-cell table:style-name="ce373" table:formula="of:=IF([.A57]=0;0;([.$C$2]-[.F57]))" office:value-type="float" office:value="0" calcext:value-type="float">
            <text:p>0.00</text:p>
          </table:table-cell>
          <table:table-cell table:style-name="ce373" table:formula="of:=IF([.A57]=0;0;([.B57]+[.F5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7]&gt;=[.$C$4];0;IF([.A57]=0;0;(1+[.A57])))" office:value-type="float" office:value="0" calcext:value-type="float">
            <text:p>0</text:p>
          </table:table-cell>
          <table:table-cell table:style-name="ce373" table:formula="of:=IF([.A58]=0;0;(PPMT([.$C$3];[.A58];[.$C$4];-[.$C$2])))" office:value-type="float" office:value="0" calcext:value-type="float">
            <text:p>0.00</text:p>
          </table:table-cell>
          <table:table-cell table:style-name="ce373" table:formula="of:=IF([.A58]=0;0;(IPMT([.$C$3];[.A58];[.$C$4];-[.$C$2])))" office:value-type="float" office:value="0" calcext:value-type="float">
            <text:p>0.00</text:p>
          </table:table-cell>
          <table:table-cell table:style-name="ce373" table:formula="of:=IF([.A58]=0;0;(PMT([.$C$3];[.$C$4];-[.$C$2])))" office:value-type="float" office:value="0" calcext:value-type="float">
            <text:p>0.00</text:p>
          </table:table-cell>
          <table:table-cell table:style-name="ce373" table:formula="of:=IF([.A58]=0;0;([.$C$2]-[.F58]))" office:value-type="float" office:value="0" calcext:value-type="float">
            <text:p>0.00</text:p>
          </table:table-cell>
          <table:table-cell table:style-name="ce373" table:formula="of:=IF([.A58]=0;0;([.B58]+[.F5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8]&gt;=[.$C$4];0;IF([.A58]=0;0;(1+[.A58])))" office:value-type="float" office:value="0" calcext:value-type="float">
            <text:p>0</text:p>
          </table:table-cell>
          <table:table-cell table:style-name="ce373" table:formula="of:=IF([.A59]=0;0;(PPMT([.$C$3];[.A59];[.$C$4];-[.$C$2])))" office:value-type="float" office:value="0" calcext:value-type="float">
            <text:p>0.00</text:p>
          </table:table-cell>
          <table:table-cell table:style-name="ce373" table:formula="of:=IF([.A59]=0;0;(IPMT([.$C$3];[.A59];[.$C$4];-[.$C$2])))" office:value-type="float" office:value="0" calcext:value-type="float">
            <text:p>0.00</text:p>
          </table:table-cell>
          <table:table-cell table:style-name="ce373" table:formula="of:=IF([.A59]=0;0;(PMT([.$C$3];[.$C$4];-[.$C$2])))" office:value-type="float" office:value="0" calcext:value-type="float">
            <text:p>0.00</text:p>
          </table:table-cell>
          <table:table-cell table:style-name="ce373" table:formula="of:=IF([.A59]=0;0;([.$C$2]-[.F59]))" office:value-type="float" office:value="0" calcext:value-type="float">
            <text:p>0.00</text:p>
          </table:table-cell>
          <table:table-cell table:style-name="ce373" table:formula="of:=IF([.A59]=0;0;([.B59]+[.F5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59]&gt;=[.$C$4];0;IF([.A59]=0;0;(1+[.A59])))" office:value-type="float" office:value="0" calcext:value-type="float">
            <text:p>0</text:p>
          </table:table-cell>
          <table:table-cell table:style-name="ce373" table:formula="of:=IF([.A60]=0;0;(PPMT([.$C$3];[.A60];[.$C$4];-[.$C$2])))" office:value-type="float" office:value="0" calcext:value-type="float">
            <text:p>0.00</text:p>
          </table:table-cell>
          <table:table-cell table:style-name="ce373" table:formula="of:=IF([.A60]=0;0;(IPMT([.$C$3];[.A60];[.$C$4];-[.$C$2])))" office:value-type="float" office:value="0" calcext:value-type="float">
            <text:p>0.00</text:p>
          </table:table-cell>
          <table:table-cell table:style-name="ce373" table:formula="of:=IF([.A60]=0;0;(PMT([.$C$3];[.$C$4];-[.$C$2])))" office:value-type="float" office:value="0" calcext:value-type="float">
            <text:p>0.00</text:p>
          </table:table-cell>
          <table:table-cell table:style-name="ce373" table:formula="of:=IF([.A60]=0;0;([.$C$2]-[.F60]))" office:value-type="float" office:value="0" calcext:value-type="float">
            <text:p>0.00</text:p>
          </table:table-cell>
          <table:table-cell table:style-name="ce373" table:formula="of:=IF([.A60]=0;0;([.B60]+[.F5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0]&gt;=[.$C$4];0;IF([.A60]=0;0;(1+[.A60])))" office:value-type="float" office:value="0" calcext:value-type="float">
            <text:p>0</text:p>
          </table:table-cell>
          <table:table-cell table:style-name="ce373" table:formula="of:=IF([.A61]=0;0;(PPMT([.$C$3];[.A61];[.$C$4];-[.$C$2])))" office:value-type="float" office:value="0" calcext:value-type="float">
            <text:p>0.00</text:p>
          </table:table-cell>
          <table:table-cell table:style-name="ce373" table:formula="of:=IF([.A61]=0;0;(IPMT([.$C$3];[.A61];[.$C$4];-[.$C$2])))" office:value-type="float" office:value="0" calcext:value-type="float">
            <text:p>0.00</text:p>
          </table:table-cell>
          <table:table-cell table:style-name="ce373" table:formula="of:=IF([.A61]=0;0;(PMT([.$C$3];[.$C$4];-[.$C$2])))" office:value-type="float" office:value="0" calcext:value-type="float">
            <text:p>0.00</text:p>
          </table:table-cell>
          <table:table-cell table:style-name="ce373" table:formula="of:=IF([.A61]=0;0;([.$C$2]-[.F61]))" office:value-type="float" office:value="0" calcext:value-type="float">
            <text:p>0.00</text:p>
          </table:table-cell>
          <table:table-cell table:style-name="ce373" table:formula="of:=IF([.A61]=0;0;([.B61]+[.F6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1]&gt;=[.$C$4];0;IF([.A61]=0;0;(1+[.A61])))" office:value-type="float" office:value="0" calcext:value-type="float">
            <text:p>0</text:p>
          </table:table-cell>
          <table:table-cell table:style-name="ce373" table:formula="of:=IF([.A62]=0;0;(PPMT([.$C$3];[.A62];[.$C$4];-[.$C$2])))" office:value-type="float" office:value="0" calcext:value-type="float">
            <text:p>0.00</text:p>
          </table:table-cell>
          <table:table-cell table:style-name="ce373" table:formula="of:=IF([.A62]=0;0;(IPMT([.$C$3];[.A62];[.$C$4];-[.$C$2])))" office:value-type="float" office:value="0" calcext:value-type="float">
            <text:p>0.00</text:p>
          </table:table-cell>
          <table:table-cell table:style-name="ce373" table:formula="of:=IF([.A62]=0;0;(PMT([.$C$3];[.$C$4];-[.$C$2])))" office:value-type="float" office:value="0" calcext:value-type="float">
            <text:p>0.00</text:p>
          </table:table-cell>
          <table:table-cell table:style-name="ce373" table:formula="of:=IF([.A62]=0;0;([.$C$2]-[.F62]))" office:value-type="float" office:value="0" calcext:value-type="float">
            <text:p>0.00</text:p>
          </table:table-cell>
          <table:table-cell table:style-name="ce373" table:formula="of:=IF([.A62]=0;0;([.B62]+[.F6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2]&gt;=[.$C$4];0;IF([.A62]=0;0;(1+[.A62])))" office:value-type="float" office:value="0" calcext:value-type="float">
            <text:p>0</text:p>
          </table:table-cell>
          <table:table-cell table:style-name="ce373" table:formula="of:=IF([.A63]=0;0;(PPMT([.$C$3];[.A63];[.$C$4];-[.$C$2])))" office:value-type="float" office:value="0" calcext:value-type="float">
            <text:p>0.00</text:p>
          </table:table-cell>
          <table:table-cell table:style-name="ce373" table:formula="of:=IF([.A63]=0;0;(IPMT([.$C$3];[.A63];[.$C$4];-[.$C$2])))" office:value-type="float" office:value="0" calcext:value-type="float">
            <text:p>0.00</text:p>
          </table:table-cell>
          <table:table-cell table:style-name="ce373" table:formula="of:=IF([.A63]=0;0;(PMT([.$C$3];[.$C$4];-[.$C$2])))" office:value-type="float" office:value="0" calcext:value-type="float">
            <text:p>0.00</text:p>
          </table:table-cell>
          <table:table-cell table:style-name="ce373" table:formula="of:=IF([.A63]=0;0;([.$C$2]-[.F63]))" office:value-type="float" office:value="0" calcext:value-type="float">
            <text:p>0.00</text:p>
          </table:table-cell>
          <table:table-cell table:style-name="ce373" table:formula="of:=IF([.A63]=0;0;([.B63]+[.F6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3]&gt;=[.$C$4];0;IF([.A63]=0;0;(1+[.A63])))" office:value-type="float" office:value="0" calcext:value-type="float">
            <text:p>0</text:p>
          </table:table-cell>
          <table:table-cell table:style-name="ce373" table:formula="of:=IF([.A64]=0;0;(PPMT([.$C$3];[.A64];[.$C$4];-[.$C$2])))" office:value-type="float" office:value="0" calcext:value-type="float">
            <text:p>0.00</text:p>
          </table:table-cell>
          <table:table-cell table:style-name="ce373" table:formula="of:=IF([.A64]=0;0;(IPMT([.$C$3];[.A64];[.$C$4];-[.$C$2])))" office:value-type="float" office:value="0" calcext:value-type="float">
            <text:p>0.00</text:p>
          </table:table-cell>
          <table:table-cell table:style-name="ce373" table:formula="of:=IF([.A64]=0;0;(PMT([.$C$3];[.$C$4];-[.$C$2])))" office:value-type="float" office:value="0" calcext:value-type="float">
            <text:p>0.00</text:p>
          </table:table-cell>
          <table:table-cell table:style-name="ce373" table:formula="of:=IF([.A64]=0;0;([.$C$2]-[.F64]))" office:value-type="float" office:value="0" calcext:value-type="float">
            <text:p>0.00</text:p>
          </table:table-cell>
          <table:table-cell table:style-name="ce373" table:formula="of:=IF([.A64]=0;0;([.B64]+[.F6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4]&gt;=[.$C$4];0;IF([.A64]=0;0;(1+[.A64])))" office:value-type="float" office:value="0" calcext:value-type="float">
            <text:p>0</text:p>
          </table:table-cell>
          <table:table-cell table:style-name="ce373" table:formula="of:=IF([.A65]=0;0;(PPMT([.$C$3];[.A65];[.$C$4];-[.$C$2])))" office:value-type="float" office:value="0" calcext:value-type="float">
            <text:p>0.00</text:p>
          </table:table-cell>
          <table:table-cell table:style-name="ce373" table:formula="of:=IF([.A65]=0;0;(IPMT([.$C$3];[.A65];[.$C$4];-[.$C$2])))" office:value-type="float" office:value="0" calcext:value-type="float">
            <text:p>0.00</text:p>
          </table:table-cell>
          <table:table-cell table:style-name="ce373" table:formula="of:=IF([.A65]=0;0;(PMT([.$C$3];[.$C$4];-[.$C$2])))" office:value-type="float" office:value="0" calcext:value-type="float">
            <text:p>0.00</text:p>
          </table:table-cell>
          <table:table-cell table:style-name="ce373" table:formula="of:=IF([.A65]=0;0;([.$C$2]-[.F65]))" office:value-type="float" office:value="0" calcext:value-type="float">
            <text:p>0.00</text:p>
          </table:table-cell>
          <table:table-cell table:style-name="ce373" table:formula="of:=IF([.A65]=0;0;([.B65]+[.F6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5]&gt;=[.$C$4];0;IF([.A65]=0;0;(1+[.A65])))" office:value-type="float" office:value="0" calcext:value-type="float">
            <text:p>0</text:p>
          </table:table-cell>
          <table:table-cell table:style-name="ce373" table:formula="of:=IF([.A66]=0;0;(PPMT([.$C$3];[.A66];[.$C$4];-[.$C$2])))" office:value-type="float" office:value="0" calcext:value-type="float">
            <text:p>0.00</text:p>
          </table:table-cell>
          <table:table-cell table:style-name="ce373" table:formula="of:=IF([.A66]=0;0;(IPMT([.$C$3];[.A66];[.$C$4];-[.$C$2])))" office:value-type="float" office:value="0" calcext:value-type="float">
            <text:p>0.00</text:p>
          </table:table-cell>
          <table:table-cell table:style-name="ce373" table:formula="of:=IF([.A66]=0;0;(PMT([.$C$3];[.$C$4];-[.$C$2])))" office:value-type="float" office:value="0" calcext:value-type="float">
            <text:p>0.00</text:p>
          </table:table-cell>
          <table:table-cell table:style-name="ce373" table:formula="of:=IF([.A66]=0;0;([.$C$2]-[.F66]))" office:value-type="float" office:value="0" calcext:value-type="float">
            <text:p>0.00</text:p>
          </table:table-cell>
          <table:table-cell table:style-name="ce373" table:formula="of:=IF([.A66]=0;0;([.B66]+[.F6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6]&gt;=[.$C$4];0;IF([.A66]=0;0;(1+[.A66])))" office:value-type="float" office:value="0" calcext:value-type="float">
            <text:p>0</text:p>
          </table:table-cell>
          <table:table-cell table:style-name="ce373" table:formula="of:=IF([.A67]=0;0;(PPMT([.$C$3];[.A67];[.$C$4];-[.$C$2])))" office:value-type="float" office:value="0" calcext:value-type="float">
            <text:p>0.00</text:p>
          </table:table-cell>
          <table:table-cell table:style-name="ce373" table:formula="of:=IF([.A67]=0;0;(IPMT([.$C$3];[.A67];[.$C$4];-[.$C$2])))" office:value-type="float" office:value="0" calcext:value-type="float">
            <text:p>0.00</text:p>
          </table:table-cell>
          <table:table-cell table:style-name="ce373" table:formula="of:=IF([.A67]=0;0;(PMT([.$C$3];[.$C$4];-[.$C$2])))" office:value-type="float" office:value="0" calcext:value-type="float">
            <text:p>0.00</text:p>
          </table:table-cell>
          <table:table-cell table:style-name="ce373" table:formula="of:=IF([.A67]=0;0;([.$C$2]-[.F67]))" office:value-type="float" office:value="0" calcext:value-type="float">
            <text:p>0.00</text:p>
          </table:table-cell>
          <table:table-cell table:style-name="ce373" table:formula="of:=IF([.A67]=0;0;([.B67]+[.F6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7]&gt;=[.$C$4];0;IF([.A67]=0;0;(1+[.A67])))" office:value-type="float" office:value="0" calcext:value-type="float">
            <text:p>0</text:p>
          </table:table-cell>
          <table:table-cell table:style-name="ce373" table:formula="of:=IF([.A68]=0;0;(PPMT([.$C$3];[.A68];[.$C$4];-[.$C$2])))" office:value-type="float" office:value="0" calcext:value-type="float">
            <text:p>0.00</text:p>
          </table:table-cell>
          <table:table-cell table:style-name="ce373" table:formula="of:=IF([.A68]=0;0;(IPMT([.$C$3];[.A68];[.$C$4];-[.$C$2])))" office:value-type="float" office:value="0" calcext:value-type="float">
            <text:p>0.00</text:p>
          </table:table-cell>
          <table:table-cell table:style-name="ce373" table:formula="of:=IF([.A68]=0;0;(PMT([.$C$3];[.$C$4];-[.$C$2])))" office:value-type="float" office:value="0" calcext:value-type="float">
            <text:p>0.00</text:p>
          </table:table-cell>
          <table:table-cell table:style-name="ce373" table:formula="of:=IF([.A68]=0;0;([.$C$2]-[.F68]))" office:value-type="float" office:value="0" calcext:value-type="float">
            <text:p>0.00</text:p>
          </table:table-cell>
          <table:table-cell table:style-name="ce373" table:formula="of:=IF([.A68]=0;0;([.B68]+[.F6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8]&gt;=[.$C$4];0;IF([.A68]=0;0;(1+[.A68])))" office:value-type="float" office:value="0" calcext:value-type="float">
            <text:p>0</text:p>
          </table:table-cell>
          <table:table-cell table:style-name="ce373" table:formula="of:=IF([.A69]=0;0;(PPMT([.$C$3];[.A69];[.$C$4];-[.$C$2])))" office:value-type="float" office:value="0" calcext:value-type="float">
            <text:p>0.00</text:p>
          </table:table-cell>
          <table:table-cell table:style-name="ce373" table:formula="of:=IF([.A69]=0;0;(IPMT([.$C$3];[.A69];[.$C$4];-[.$C$2])))" office:value-type="float" office:value="0" calcext:value-type="float">
            <text:p>0.00</text:p>
          </table:table-cell>
          <table:table-cell table:style-name="ce373" table:formula="of:=IF([.A69]=0;0;(PMT([.$C$3];[.$C$4];-[.$C$2])))" office:value-type="float" office:value="0" calcext:value-type="float">
            <text:p>0.00</text:p>
          </table:table-cell>
          <table:table-cell table:style-name="ce373" table:formula="of:=IF([.A69]=0;0;([.$C$2]-[.F69]))" office:value-type="float" office:value="0" calcext:value-type="float">
            <text:p>0.00</text:p>
          </table:table-cell>
          <table:table-cell table:style-name="ce373" table:formula="of:=IF([.A69]=0;0;([.B69]+[.F6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69]&gt;=[.$C$4];0;IF([.A69]=0;0;(1+[.A69])))" office:value-type="float" office:value="0" calcext:value-type="float">
            <text:p>0</text:p>
          </table:table-cell>
          <table:table-cell table:style-name="ce373" table:formula="of:=IF([.A70]=0;0;(PPMT([.$C$3];[.A70];[.$C$4];-[.$C$2])))" office:value-type="float" office:value="0" calcext:value-type="float">
            <text:p>0.00</text:p>
          </table:table-cell>
          <table:table-cell table:style-name="ce373" table:formula="of:=IF([.A70]=0;0;(IPMT([.$C$3];[.A70];[.$C$4];-[.$C$2])))" office:value-type="float" office:value="0" calcext:value-type="float">
            <text:p>0.00</text:p>
          </table:table-cell>
          <table:table-cell table:style-name="ce373" table:formula="of:=IF([.A70]=0;0;(PMT([.$C$3];[.$C$4];-[.$C$2])))" office:value-type="float" office:value="0" calcext:value-type="float">
            <text:p>0.00</text:p>
          </table:table-cell>
          <table:table-cell table:style-name="ce373" table:formula="of:=IF([.A70]=0;0;([.$C$2]-[.F70]))" office:value-type="float" office:value="0" calcext:value-type="float">
            <text:p>0.00</text:p>
          </table:table-cell>
          <table:table-cell table:style-name="ce373" table:formula="of:=IF([.A70]=0;0;([.B70]+[.F6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0]&gt;=[.$C$4];0;IF([.A70]=0;0;(1+[.A70])))" office:value-type="float" office:value="0" calcext:value-type="float">
            <text:p>0</text:p>
          </table:table-cell>
          <table:table-cell table:style-name="ce373" table:formula="of:=IF([.A71]=0;0;(PPMT([.$C$3];[.A71];[.$C$4];-[.$C$2])))" office:value-type="float" office:value="0" calcext:value-type="float">
            <text:p>0.00</text:p>
          </table:table-cell>
          <table:table-cell table:style-name="ce373" table:formula="of:=IF([.A71]=0;0;(IPMT([.$C$3];[.A71];[.$C$4];-[.$C$2])))" office:value-type="float" office:value="0" calcext:value-type="float">
            <text:p>0.00</text:p>
          </table:table-cell>
          <table:table-cell table:style-name="ce373" table:formula="of:=IF([.A71]=0;0;(PMT([.$C$3];[.$C$4];-[.$C$2])))" office:value-type="float" office:value="0" calcext:value-type="float">
            <text:p>0.00</text:p>
          </table:table-cell>
          <table:table-cell table:style-name="ce373" table:formula="of:=IF([.A71]=0;0;([.$C$2]-[.F71]))" office:value-type="float" office:value="0" calcext:value-type="float">
            <text:p>0.00</text:p>
          </table:table-cell>
          <table:table-cell table:style-name="ce373" table:formula="of:=IF([.A71]=0;0;([.B71]+[.F7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1]&gt;=[.$C$4];0;IF([.A71]=0;0;(1+[.A71])))" office:value-type="float" office:value="0" calcext:value-type="float">
            <text:p>0</text:p>
          </table:table-cell>
          <table:table-cell table:style-name="ce373" table:formula="of:=IF([.A72]=0;0;(PPMT([.$C$3];[.A72];[.$C$4];-[.$C$2])))" office:value-type="float" office:value="0" calcext:value-type="float">
            <text:p>0.00</text:p>
          </table:table-cell>
          <table:table-cell table:style-name="ce373" table:formula="of:=IF([.A72]=0;0;(IPMT([.$C$3];[.A72];[.$C$4];-[.$C$2])))" office:value-type="float" office:value="0" calcext:value-type="float">
            <text:p>0.00</text:p>
          </table:table-cell>
          <table:table-cell table:style-name="ce373" table:formula="of:=IF([.A72]=0;0;(PMT([.$C$3];[.$C$4];-[.$C$2])))" office:value-type="float" office:value="0" calcext:value-type="float">
            <text:p>0.00</text:p>
          </table:table-cell>
          <table:table-cell table:style-name="ce373" table:formula="of:=IF([.A72]=0;0;([.$C$2]-[.F72]))" office:value-type="float" office:value="0" calcext:value-type="float">
            <text:p>0.00</text:p>
          </table:table-cell>
          <table:table-cell table:style-name="ce373" table:formula="of:=IF([.A72]=0;0;([.B72]+[.F7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2]&gt;=[.$C$4];0;IF([.A72]=0;0;(1+[.A72])))" office:value-type="float" office:value="0" calcext:value-type="float">
            <text:p>0</text:p>
          </table:table-cell>
          <table:table-cell table:style-name="ce373" table:formula="of:=IF([.A73]=0;0;(PPMT([.$C$3];[.A73];[.$C$4];-[.$C$2])))" office:value-type="float" office:value="0" calcext:value-type="float">
            <text:p>0.00</text:p>
          </table:table-cell>
          <table:table-cell table:style-name="ce373" table:formula="of:=IF([.A73]=0;0;(IPMT([.$C$3];[.A73];[.$C$4];-[.$C$2])))" office:value-type="float" office:value="0" calcext:value-type="float">
            <text:p>0.00</text:p>
          </table:table-cell>
          <table:table-cell table:style-name="ce373" table:formula="of:=IF([.A73]=0;0;(PMT([.$C$3];[.$C$4];-[.$C$2])))" office:value-type="float" office:value="0" calcext:value-type="float">
            <text:p>0.00</text:p>
          </table:table-cell>
          <table:table-cell table:style-name="ce373" table:formula="of:=IF([.A73]=0;0;([.$C$2]-[.F73]))" office:value-type="float" office:value="0" calcext:value-type="float">
            <text:p>0.00</text:p>
          </table:table-cell>
          <table:table-cell table:style-name="ce373" table:formula="of:=IF([.A73]=0;0;([.B73]+[.F7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3]&gt;=[.$C$4];0;IF([.A73]=0;0;(1+[.A73])))" office:value-type="float" office:value="0" calcext:value-type="float">
            <text:p>0</text:p>
          </table:table-cell>
          <table:table-cell table:style-name="ce373" table:formula="of:=IF([.A74]=0;0;(PPMT([.$C$3];[.A74];[.$C$4];-[.$C$2])))" office:value-type="float" office:value="0" calcext:value-type="float">
            <text:p>0.00</text:p>
          </table:table-cell>
          <table:table-cell table:style-name="ce373" table:formula="of:=IF([.A74]=0;0;(IPMT([.$C$3];[.A74];[.$C$4];-[.$C$2])))" office:value-type="float" office:value="0" calcext:value-type="float">
            <text:p>0.00</text:p>
          </table:table-cell>
          <table:table-cell table:style-name="ce373" table:formula="of:=IF([.A74]=0;0;(PMT([.$C$3];[.$C$4];-[.$C$2])))" office:value-type="float" office:value="0" calcext:value-type="float">
            <text:p>0.00</text:p>
          </table:table-cell>
          <table:table-cell table:style-name="ce373" table:formula="of:=IF([.A74]=0;0;([.$C$2]-[.F74]))" office:value-type="float" office:value="0" calcext:value-type="float">
            <text:p>0.00</text:p>
          </table:table-cell>
          <table:table-cell table:style-name="ce373" table:formula="of:=IF([.A74]=0;0;([.B74]+[.F7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4]&gt;=[.$C$4];0;IF([.A74]=0;0;(1+[.A74])))" office:value-type="float" office:value="0" calcext:value-type="float">
            <text:p>0</text:p>
          </table:table-cell>
          <table:table-cell table:style-name="ce373" table:formula="of:=IF([.A75]=0;0;(PPMT([.$C$3];[.A75];[.$C$4];-[.$C$2])))" office:value-type="float" office:value="0" calcext:value-type="float">
            <text:p>0.00</text:p>
          </table:table-cell>
          <table:table-cell table:style-name="ce373" table:formula="of:=IF([.A75]=0;0;(IPMT([.$C$3];[.A75];[.$C$4];-[.$C$2])))" office:value-type="float" office:value="0" calcext:value-type="float">
            <text:p>0.00</text:p>
          </table:table-cell>
          <table:table-cell table:style-name="ce373" table:formula="of:=IF([.A75]=0;0;(PMT([.$C$3];[.$C$4];-[.$C$2])))" office:value-type="float" office:value="0" calcext:value-type="float">
            <text:p>0.00</text:p>
          </table:table-cell>
          <table:table-cell table:style-name="ce373" table:formula="of:=IF([.A75]=0;0;([.$C$2]-[.F75]))" office:value-type="float" office:value="0" calcext:value-type="float">
            <text:p>0.00</text:p>
          </table:table-cell>
          <table:table-cell table:style-name="ce373" table:formula="of:=IF([.A75]=0;0;([.B75]+[.F7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5]&gt;=[.$C$4];0;IF([.A75]=0;0;(1+[.A75])))" office:value-type="float" office:value="0" calcext:value-type="float">
            <text:p>0</text:p>
          </table:table-cell>
          <table:table-cell table:style-name="ce373" table:formula="of:=IF([.A76]=0;0;(PPMT([.$C$3];[.A76];[.$C$4];-[.$C$2])))" office:value-type="float" office:value="0" calcext:value-type="float">
            <text:p>0.00</text:p>
          </table:table-cell>
          <table:table-cell table:style-name="ce373" table:formula="of:=IF([.A76]=0;0;(IPMT([.$C$3];[.A76];[.$C$4];-[.$C$2])))" office:value-type="float" office:value="0" calcext:value-type="float">
            <text:p>0.00</text:p>
          </table:table-cell>
          <table:table-cell table:style-name="ce373" table:formula="of:=IF([.A76]=0;0;(PMT([.$C$3];[.$C$4];-[.$C$2])))" office:value-type="float" office:value="0" calcext:value-type="float">
            <text:p>0.00</text:p>
          </table:table-cell>
          <table:table-cell table:style-name="ce373" table:formula="of:=IF([.A76]=0;0;([.$C$2]-[.F76]))" office:value-type="float" office:value="0" calcext:value-type="float">
            <text:p>0.00</text:p>
          </table:table-cell>
          <table:table-cell table:style-name="ce373" table:formula="of:=IF([.A76]=0;0;([.B76]+[.F7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6]&gt;=[.$C$4];0;IF([.A76]=0;0;(1+[.A76])))" office:value-type="float" office:value="0" calcext:value-type="float">
            <text:p>0</text:p>
          </table:table-cell>
          <table:table-cell table:style-name="ce373" table:formula="of:=IF([.A77]=0;0;(PPMT([.$C$3];[.A77];[.$C$4];-[.$C$2])))" office:value-type="float" office:value="0" calcext:value-type="float">
            <text:p>0.00</text:p>
          </table:table-cell>
          <table:table-cell table:style-name="ce373" table:formula="of:=IF([.A77]=0;0;(IPMT([.$C$3];[.A77];[.$C$4];-[.$C$2])))" office:value-type="float" office:value="0" calcext:value-type="float">
            <text:p>0.00</text:p>
          </table:table-cell>
          <table:table-cell table:style-name="ce373" table:formula="of:=IF([.A77]=0;0;(PMT([.$C$3];[.$C$4];-[.$C$2])))" office:value-type="float" office:value="0" calcext:value-type="float">
            <text:p>0.00</text:p>
          </table:table-cell>
          <table:table-cell table:style-name="ce373" table:formula="of:=IF([.A77]=0;0;([.$C$2]-[.F77]))" office:value-type="float" office:value="0" calcext:value-type="float">
            <text:p>0.00</text:p>
          </table:table-cell>
          <table:table-cell table:style-name="ce373" table:formula="of:=IF([.A77]=0;0;([.B77]+[.F7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7]&gt;=[.$C$4];0;IF([.A77]=0;0;(1+[.A77])))" office:value-type="float" office:value="0" calcext:value-type="float">
            <text:p>0</text:p>
          </table:table-cell>
          <table:table-cell table:style-name="ce373" table:formula="of:=IF([.A78]=0;0;(PPMT([.$C$3];[.A78];[.$C$4];-[.$C$2])))" office:value-type="float" office:value="0" calcext:value-type="float">
            <text:p>0.00</text:p>
          </table:table-cell>
          <table:table-cell table:style-name="ce373" table:formula="of:=IF([.A78]=0;0;(IPMT([.$C$3];[.A78];[.$C$4];-[.$C$2])))" office:value-type="float" office:value="0" calcext:value-type="float">
            <text:p>0.00</text:p>
          </table:table-cell>
          <table:table-cell table:style-name="ce373" table:formula="of:=IF([.A78]=0;0;(PMT([.$C$3];[.$C$4];-[.$C$2])))" office:value-type="float" office:value="0" calcext:value-type="float">
            <text:p>0.00</text:p>
          </table:table-cell>
          <table:table-cell table:style-name="ce373" table:formula="of:=IF([.A78]=0;0;([.$C$2]-[.F78]))" office:value-type="float" office:value="0" calcext:value-type="float">
            <text:p>0.00</text:p>
          </table:table-cell>
          <table:table-cell table:style-name="ce373" table:formula="of:=IF([.A78]=0;0;([.B78]+[.F7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8]&gt;=[.$C$4];0;IF([.A78]=0;0;(1+[.A78])))" office:value-type="float" office:value="0" calcext:value-type="float">
            <text:p>0</text:p>
          </table:table-cell>
          <table:table-cell table:style-name="ce373" table:formula="of:=IF([.A79]=0;0;(PPMT([.$C$3];[.A79];[.$C$4];-[.$C$2])))" office:value-type="float" office:value="0" calcext:value-type="float">
            <text:p>0.00</text:p>
          </table:table-cell>
          <table:table-cell table:style-name="ce373" table:formula="of:=IF([.A79]=0;0;(IPMT([.$C$3];[.A79];[.$C$4];-[.$C$2])))" office:value-type="float" office:value="0" calcext:value-type="float">
            <text:p>0.00</text:p>
          </table:table-cell>
          <table:table-cell table:style-name="ce373" table:formula="of:=IF([.A79]=0;0;(PMT([.$C$3];[.$C$4];-[.$C$2])))" office:value-type="float" office:value="0" calcext:value-type="float">
            <text:p>0.00</text:p>
          </table:table-cell>
          <table:table-cell table:style-name="ce373" table:formula="of:=IF([.A79]=0;0;([.$C$2]-[.F79]))" office:value-type="float" office:value="0" calcext:value-type="float">
            <text:p>0.00</text:p>
          </table:table-cell>
          <table:table-cell table:style-name="ce373" table:formula="of:=IF([.A79]=0;0;([.B79]+[.F7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79]&gt;=[.$C$4];0;IF([.A79]=0;0;(1+[.A79])))" office:value-type="float" office:value="0" calcext:value-type="float">
            <text:p>0</text:p>
          </table:table-cell>
          <table:table-cell table:style-name="ce373" table:formula="of:=IF([.A80]=0;0;(PPMT([.$C$3];[.A80];[.$C$4];-[.$C$2])))" office:value-type="float" office:value="0" calcext:value-type="float">
            <text:p>0.00</text:p>
          </table:table-cell>
          <table:table-cell table:style-name="ce373" table:formula="of:=IF([.A80]=0;0;(IPMT([.$C$3];[.A80];[.$C$4];-[.$C$2])))" office:value-type="float" office:value="0" calcext:value-type="float">
            <text:p>0.00</text:p>
          </table:table-cell>
          <table:table-cell table:style-name="ce373" table:formula="of:=IF([.A80]=0;0;(PMT([.$C$3];[.$C$4];-[.$C$2])))" office:value-type="float" office:value="0" calcext:value-type="float">
            <text:p>0.00</text:p>
          </table:table-cell>
          <table:table-cell table:style-name="ce373" table:formula="of:=IF([.A80]=0;0;([.$C$2]-[.F80]))" office:value-type="float" office:value="0" calcext:value-type="float">
            <text:p>0.00</text:p>
          </table:table-cell>
          <table:table-cell table:style-name="ce373" table:formula="of:=IF([.A80]=0;0;([.B80]+[.F7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0]&gt;=[.$C$4];0;IF([.A80]=0;0;(1+[.A80])))" office:value-type="float" office:value="0" calcext:value-type="float">
            <text:p>0</text:p>
          </table:table-cell>
          <table:table-cell table:style-name="ce373" table:formula="of:=IF([.A81]=0;0;(PPMT([.$C$3];[.A81];[.$C$4];-[.$C$2])))" office:value-type="float" office:value="0" calcext:value-type="float">
            <text:p>0.00</text:p>
          </table:table-cell>
          <table:table-cell table:style-name="ce373" table:formula="of:=IF([.A81]=0;0;(IPMT([.$C$3];[.A81];[.$C$4];-[.$C$2])))" office:value-type="float" office:value="0" calcext:value-type="float">
            <text:p>0.00</text:p>
          </table:table-cell>
          <table:table-cell table:style-name="ce373" table:formula="of:=IF([.A81]=0;0;(PMT([.$C$3];[.$C$4];-[.$C$2])))" office:value-type="float" office:value="0" calcext:value-type="float">
            <text:p>0.00</text:p>
          </table:table-cell>
          <table:table-cell table:style-name="ce373" table:formula="of:=IF([.A81]=0;0;([.$C$2]-[.F81]))" office:value-type="float" office:value="0" calcext:value-type="float">
            <text:p>0.00</text:p>
          </table:table-cell>
          <table:table-cell table:style-name="ce373" table:formula="of:=IF([.A81]=0;0;([.B81]+[.F8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1]&gt;=[.$C$4];0;IF([.A81]=0;0;(1+[.A81])))" office:value-type="float" office:value="0" calcext:value-type="float">
            <text:p>0</text:p>
          </table:table-cell>
          <table:table-cell table:style-name="ce373" table:formula="of:=IF([.A82]=0;0;(PPMT([.$C$3];[.A82];[.$C$4];-[.$C$2])))" office:value-type="float" office:value="0" calcext:value-type="float">
            <text:p>0.00</text:p>
          </table:table-cell>
          <table:table-cell table:style-name="ce373" table:formula="of:=IF([.A82]=0;0;(IPMT([.$C$3];[.A82];[.$C$4];-[.$C$2])))" office:value-type="float" office:value="0" calcext:value-type="float">
            <text:p>0.00</text:p>
          </table:table-cell>
          <table:table-cell table:style-name="ce373" table:formula="of:=IF([.A82]=0;0;(PMT([.$C$3];[.$C$4];-[.$C$2])))" office:value-type="float" office:value="0" calcext:value-type="float">
            <text:p>0.00</text:p>
          </table:table-cell>
          <table:table-cell table:style-name="ce373" table:formula="of:=IF([.A82]=0;0;([.$C$2]-[.F82]))" office:value-type="float" office:value="0" calcext:value-type="float">
            <text:p>0.00</text:p>
          </table:table-cell>
          <table:table-cell table:style-name="ce373" table:formula="of:=IF([.A82]=0;0;([.B82]+[.F8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2]&gt;=[.$C$4];0;IF([.A82]=0;0;(1+[.A82])))" office:value-type="float" office:value="0" calcext:value-type="float">
            <text:p>0</text:p>
          </table:table-cell>
          <table:table-cell table:style-name="ce373" table:formula="of:=IF([.A83]=0;0;(PPMT([.$C$3];[.A83];[.$C$4];-[.$C$2])))" office:value-type="float" office:value="0" calcext:value-type="float">
            <text:p>0.00</text:p>
          </table:table-cell>
          <table:table-cell table:style-name="ce373" table:formula="of:=IF([.A83]=0;0;(IPMT([.$C$3];[.A83];[.$C$4];-[.$C$2])))" office:value-type="float" office:value="0" calcext:value-type="float">
            <text:p>0.00</text:p>
          </table:table-cell>
          <table:table-cell table:style-name="ce373" table:formula="of:=IF([.A83]=0;0;(PMT([.$C$3];[.$C$4];-[.$C$2])))" office:value-type="float" office:value="0" calcext:value-type="float">
            <text:p>0.00</text:p>
          </table:table-cell>
          <table:table-cell table:style-name="ce373" table:formula="of:=IF([.A83]=0;0;([.$C$2]-[.F83]))" office:value-type="float" office:value="0" calcext:value-type="float">
            <text:p>0.00</text:p>
          </table:table-cell>
          <table:table-cell table:style-name="ce373" table:formula="of:=IF([.A83]=0;0;([.B83]+[.F8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3]&gt;=[.$C$4];0;IF([.A83]=0;0;(1+[.A83])))" office:value-type="float" office:value="0" calcext:value-type="float">
            <text:p>0</text:p>
          </table:table-cell>
          <table:table-cell table:style-name="ce373" table:formula="of:=IF([.A84]=0;0;(PPMT([.$C$3];[.A84];[.$C$4];-[.$C$2])))" office:value-type="float" office:value="0" calcext:value-type="float">
            <text:p>0.00</text:p>
          </table:table-cell>
          <table:table-cell table:style-name="ce373" table:formula="of:=IF([.A84]=0;0;(IPMT([.$C$3];[.A84];[.$C$4];-[.$C$2])))" office:value-type="float" office:value="0" calcext:value-type="float">
            <text:p>0.00</text:p>
          </table:table-cell>
          <table:table-cell table:style-name="ce373" table:formula="of:=IF([.A84]=0;0;(PMT([.$C$3];[.$C$4];-[.$C$2])))" office:value-type="float" office:value="0" calcext:value-type="float">
            <text:p>0.00</text:p>
          </table:table-cell>
          <table:table-cell table:style-name="ce373" table:formula="of:=IF([.A84]=0;0;([.$C$2]-[.F84]))" office:value-type="float" office:value="0" calcext:value-type="float">
            <text:p>0.00</text:p>
          </table:table-cell>
          <table:table-cell table:style-name="ce373" table:formula="of:=IF([.A84]=0;0;([.B84]+[.F8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4]&gt;=[.$C$4];0;IF([.A84]=0;0;(1+[.A84])))" office:value-type="float" office:value="0" calcext:value-type="float">
            <text:p>0</text:p>
          </table:table-cell>
          <table:table-cell table:style-name="ce373" table:formula="of:=IF([.A85]=0;0;(PPMT([.$C$3];[.A85];[.$C$4];-[.$C$2])))" office:value-type="float" office:value="0" calcext:value-type="float">
            <text:p>0.00</text:p>
          </table:table-cell>
          <table:table-cell table:style-name="ce373" table:formula="of:=IF([.A85]=0;0;(IPMT([.$C$3];[.A85];[.$C$4];-[.$C$2])))" office:value-type="float" office:value="0" calcext:value-type="float">
            <text:p>0.00</text:p>
          </table:table-cell>
          <table:table-cell table:style-name="ce373" table:formula="of:=IF([.A85]=0;0;(PMT([.$C$3];[.$C$4];-[.$C$2])))" office:value-type="float" office:value="0" calcext:value-type="float">
            <text:p>0.00</text:p>
          </table:table-cell>
          <table:table-cell table:style-name="ce373" table:formula="of:=IF([.A85]=0;0;([.$C$2]-[.F85]))" office:value-type="float" office:value="0" calcext:value-type="float">
            <text:p>0.00</text:p>
          </table:table-cell>
          <table:table-cell table:style-name="ce373" table:formula="of:=IF([.A85]=0;0;([.B85]+[.F8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5]&gt;=[.$C$4];0;IF([.A85]=0;0;(1+[.A85])))" office:value-type="float" office:value="0" calcext:value-type="float">
            <text:p>0</text:p>
          </table:table-cell>
          <table:table-cell table:style-name="ce373" table:formula="of:=IF([.A86]=0;0;(PPMT([.$C$3];[.A86];[.$C$4];-[.$C$2])))" office:value-type="float" office:value="0" calcext:value-type="float">
            <text:p>0.00</text:p>
          </table:table-cell>
          <table:table-cell table:style-name="ce373" table:formula="of:=IF([.A86]=0;0;(IPMT([.$C$3];[.A86];[.$C$4];-[.$C$2])))" office:value-type="float" office:value="0" calcext:value-type="float">
            <text:p>0.00</text:p>
          </table:table-cell>
          <table:table-cell table:style-name="ce373" table:formula="of:=IF([.A86]=0;0;(PMT([.$C$3];[.$C$4];-[.$C$2])))" office:value-type="float" office:value="0" calcext:value-type="float">
            <text:p>0.00</text:p>
          </table:table-cell>
          <table:table-cell table:style-name="ce373" table:formula="of:=IF([.A86]=0;0;([.$C$2]-[.F86]))" office:value-type="float" office:value="0" calcext:value-type="float">
            <text:p>0.00</text:p>
          </table:table-cell>
          <table:table-cell table:style-name="ce373" table:formula="of:=IF([.A86]=0;0;([.B86]+[.F8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6]&gt;=[.$C$4];0;IF([.A86]=0;0;(1+[.A86])))" office:value-type="float" office:value="0" calcext:value-type="float">
            <text:p>0</text:p>
          </table:table-cell>
          <table:table-cell table:style-name="ce373" table:formula="of:=IF([.A87]=0;0;(PPMT([.$C$3];[.A87];[.$C$4];-[.$C$2])))" office:value-type="float" office:value="0" calcext:value-type="float">
            <text:p>0.00</text:p>
          </table:table-cell>
          <table:table-cell table:style-name="ce373" table:formula="of:=IF([.A87]=0;0;(IPMT([.$C$3];[.A87];[.$C$4];-[.$C$2])))" office:value-type="float" office:value="0" calcext:value-type="float">
            <text:p>0.00</text:p>
          </table:table-cell>
          <table:table-cell table:style-name="ce373" table:formula="of:=IF([.A87]=0;0;(PMT([.$C$3];[.$C$4];-[.$C$2])))" office:value-type="float" office:value="0" calcext:value-type="float">
            <text:p>0.00</text:p>
          </table:table-cell>
          <table:table-cell table:style-name="ce373" table:formula="of:=IF([.A87]=0;0;([.$C$2]-[.F87]))" office:value-type="float" office:value="0" calcext:value-type="float">
            <text:p>0.00</text:p>
          </table:table-cell>
          <table:table-cell table:style-name="ce373" table:formula="of:=IF([.A87]=0;0;([.B87]+[.F8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7]&gt;=[.$C$4];0;IF([.A87]=0;0;(1+[.A87])))" office:value-type="float" office:value="0" calcext:value-type="float">
            <text:p>0</text:p>
          </table:table-cell>
          <table:table-cell table:style-name="ce373" table:formula="of:=IF([.A88]=0;0;(PPMT([.$C$3];[.A88];[.$C$4];-[.$C$2])))" office:value-type="float" office:value="0" calcext:value-type="float">
            <text:p>0.00</text:p>
          </table:table-cell>
          <table:table-cell table:style-name="ce373" table:formula="of:=IF([.A88]=0;0;(IPMT([.$C$3];[.A88];[.$C$4];-[.$C$2])))" office:value-type="float" office:value="0" calcext:value-type="float">
            <text:p>0.00</text:p>
          </table:table-cell>
          <table:table-cell table:style-name="ce373" table:formula="of:=IF([.A88]=0;0;(PMT([.$C$3];[.$C$4];-[.$C$2])))" office:value-type="float" office:value="0" calcext:value-type="float">
            <text:p>0.00</text:p>
          </table:table-cell>
          <table:table-cell table:style-name="ce373" table:formula="of:=IF([.A88]=0;0;([.$C$2]-[.F88]))" office:value-type="float" office:value="0" calcext:value-type="float">
            <text:p>0.00</text:p>
          </table:table-cell>
          <table:table-cell table:style-name="ce373" table:formula="of:=IF([.A88]=0;0;([.B88]+[.F8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8]&gt;=[.$C$4];0;IF([.A88]=0;0;(1+[.A88])))" office:value-type="float" office:value="0" calcext:value-type="float">
            <text:p>0</text:p>
          </table:table-cell>
          <table:table-cell table:style-name="ce373" table:formula="of:=IF([.A89]=0;0;(PPMT([.$C$3];[.A89];[.$C$4];-[.$C$2])))" office:value-type="float" office:value="0" calcext:value-type="float">
            <text:p>0.00</text:p>
          </table:table-cell>
          <table:table-cell table:style-name="ce373" table:formula="of:=IF([.A89]=0;0;(IPMT([.$C$3];[.A89];[.$C$4];-[.$C$2])))" office:value-type="float" office:value="0" calcext:value-type="float">
            <text:p>0.00</text:p>
          </table:table-cell>
          <table:table-cell table:style-name="ce373" table:formula="of:=IF([.A89]=0;0;(PMT([.$C$3];[.$C$4];-[.$C$2])))" office:value-type="float" office:value="0" calcext:value-type="float">
            <text:p>0.00</text:p>
          </table:table-cell>
          <table:table-cell table:style-name="ce373" table:formula="of:=IF([.A89]=0;0;([.$C$2]-[.F89]))" office:value-type="float" office:value="0" calcext:value-type="float">
            <text:p>0.00</text:p>
          </table:table-cell>
          <table:table-cell table:style-name="ce373" table:formula="of:=IF([.A89]=0;0;([.B89]+[.F8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89]&gt;=[.$C$4];0;IF([.A89]=0;0;(1+[.A89])))" office:value-type="float" office:value="0" calcext:value-type="float">
            <text:p>0</text:p>
          </table:table-cell>
          <table:table-cell table:style-name="ce373" table:formula="of:=IF([.A90]=0;0;(PPMT([.$C$3];[.A90];[.$C$4];-[.$C$2])))" office:value-type="float" office:value="0" calcext:value-type="float">
            <text:p>0.00</text:p>
          </table:table-cell>
          <table:table-cell table:style-name="ce373" table:formula="of:=IF([.A90]=0;0;(IPMT([.$C$3];[.A90];[.$C$4];-[.$C$2])))" office:value-type="float" office:value="0" calcext:value-type="float">
            <text:p>0.00</text:p>
          </table:table-cell>
          <table:table-cell table:style-name="ce373" table:formula="of:=IF([.A90]=0;0;(PMT([.$C$3];[.$C$4];-[.$C$2])))" office:value-type="float" office:value="0" calcext:value-type="float">
            <text:p>0.00</text:p>
          </table:table-cell>
          <table:table-cell table:style-name="ce373" table:formula="of:=IF([.A90]=0;0;([.$C$2]-[.F90]))" office:value-type="float" office:value="0" calcext:value-type="float">
            <text:p>0.00</text:p>
          </table:table-cell>
          <table:table-cell table:style-name="ce373" table:formula="of:=IF([.A90]=0;0;([.B90]+[.F8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0]&gt;=[.$C$4];0;IF([.A90]=0;0;(1+[.A90])))" office:value-type="float" office:value="0" calcext:value-type="float">
            <text:p>0</text:p>
          </table:table-cell>
          <table:table-cell table:style-name="ce373" table:formula="of:=IF([.A91]=0;0;(PPMT([.$C$3];[.A91];[.$C$4];-[.$C$2])))" office:value-type="float" office:value="0" calcext:value-type="float">
            <text:p>0.00</text:p>
          </table:table-cell>
          <table:table-cell table:style-name="ce373" table:formula="of:=IF([.A91]=0;0;(IPMT([.$C$3];[.A91];[.$C$4];-[.$C$2])))" office:value-type="float" office:value="0" calcext:value-type="float">
            <text:p>0.00</text:p>
          </table:table-cell>
          <table:table-cell table:style-name="ce373" table:formula="of:=IF([.A91]=0;0;(PMT([.$C$3];[.$C$4];-[.$C$2])))" office:value-type="float" office:value="0" calcext:value-type="float">
            <text:p>0.00</text:p>
          </table:table-cell>
          <table:table-cell table:style-name="ce373" table:formula="of:=IF([.A91]=0;0;([.$C$2]-[.F91]))" office:value-type="float" office:value="0" calcext:value-type="float">
            <text:p>0.00</text:p>
          </table:table-cell>
          <table:table-cell table:style-name="ce373" table:formula="of:=IF([.A91]=0;0;([.B91]+[.F9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1]&gt;=[.$C$4];0;IF([.A91]=0;0;(1+[.A91])))" office:value-type="float" office:value="0" calcext:value-type="float">
            <text:p>0</text:p>
          </table:table-cell>
          <table:table-cell table:style-name="ce373" table:formula="of:=IF([.A92]=0;0;(PPMT([.$C$3];[.A92];[.$C$4];-[.$C$2])))" office:value-type="float" office:value="0" calcext:value-type="float">
            <text:p>0.00</text:p>
          </table:table-cell>
          <table:table-cell table:style-name="ce373" table:formula="of:=IF([.A92]=0;0;(IPMT([.$C$3];[.A92];[.$C$4];-[.$C$2])))" office:value-type="float" office:value="0" calcext:value-type="float">
            <text:p>0.00</text:p>
          </table:table-cell>
          <table:table-cell table:style-name="ce373" table:formula="of:=IF([.A92]=0;0;(PMT([.$C$3];[.$C$4];-[.$C$2])))" office:value-type="float" office:value="0" calcext:value-type="float">
            <text:p>0.00</text:p>
          </table:table-cell>
          <table:table-cell table:style-name="ce373" table:formula="of:=IF([.A92]=0;0;([.$C$2]-[.F92]))" office:value-type="float" office:value="0" calcext:value-type="float">
            <text:p>0.00</text:p>
          </table:table-cell>
          <table:table-cell table:style-name="ce373" table:formula="of:=IF([.A92]=0;0;([.B92]+[.F9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2]&gt;=[.$C$4];0;IF([.A92]=0;0;(1+[.A92])))" office:value-type="float" office:value="0" calcext:value-type="float">
            <text:p>0</text:p>
          </table:table-cell>
          <table:table-cell table:style-name="ce373" table:formula="of:=IF([.A93]=0;0;(PPMT([.$C$3];[.A93];[.$C$4];-[.$C$2])))" office:value-type="float" office:value="0" calcext:value-type="float">
            <text:p>0.00</text:p>
          </table:table-cell>
          <table:table-cell table:style-name="ce373" table:formula="of:=IF([.A93]=0;0;(IPMT([.$C$3];[.A93];[.$C$4];-[.$C$2])))" office:value-type="float" office:value="0" calcext:value-type="float">
            <text:p>0.00</text:p>
          </table:table-cell>
          <table:table-cell table:style-name="ce373" table:formula="of:=IF([.A93]=0;0;(PMT([.$C$3];[.$C$4];-[.$C$2])))" office:value-type="float" office:value="0" calcext:value-type="float">
            <text:p>0.00</text:p>
          </table:table-cell>
          <table:table-cell table:style-name="ce373" table:formula="of:=IF([.A93]=0;0;([.$C$2]-[.F93]))" office:value-type="float" office:value="0" calcext:value-type="float">
            <text:p>0.00</text:p>
          </table:table-cell>
          <table:table-cell table:style-name="ce373" table:formula="of:=IF([.A93]=0;0;([.B93]+[.F9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3]&gt;=[.$C$4];0;IF([.A93]=0;0;(1+[.A93])))" office:value-type="float" office:value="0" calcext:value-type="float">
            <text:p>0</text:p>
          </table:table-cell>
          <table:table-cell table:style-name="ce373" table:formula="of:=IF([.A94]=0;0;(PPMT([.$C$3];[.A94];[.$C$4];-[.$C$2])))" office:value-type="float" office:value="0" calcext:value-type="float">
            <text:p>0.00</text:p>
          </table:table-cell>
          <table:table-cell table:style-name="ce373" table:formula="of:=IF([.A94]=0;0;(IPMT([.$C$3];[.A94];[.$C$4];-[.$C$2])))" office:value-type="float" office:value="0" calcext:value-type="float">
            <text:p>0.00</text:p>
          </table:table-cell>
          <table:table-cell table:style-name="ce373" table:formula="of:=IF([.A94]=0;0;(PMT([.$C$3];[.$C$4];-[.$C$2])))" office:value-type="float" office:value="0" calcext:value-type="float">
            <text:p>0.00</text:p>
          </table:table-cell>
          <table:table-cell table:style-name="ce373" table:formula="of:=IF([.A94]=0;0;([.$C$2]-[.F94]))" office:value-type="float" office:value="0" calcext:value-type="float">
            <text:p>0.00</text:p>
          </table:table-cell>
          <table:table-cell table:style-name="ce373" table:formula="of:=IF([.A94]=0;0;([.B94]+[.F9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4]&gt;=[.$C$4];0;IF([.A94]=0;0;(1+[.A94])))" office:value-type="float" office:value="0" calcext:value-type="float">
            <text:p>0</text:p>
          </table:table-cell>
          <table:table-cell table:style-name="ce373" table:formula="of:=IF([.A95]=0;0;(PPMT([.$C$3];[.A95];[.$C$4];-[.$C$2])))" office:value-type="float" office:value="0" calcext:value-type="float">
            <text:p>0.00</text:p>
          </table:table-cell>
          <table:table-cell table:style-name="ce373" table:formula="of:=IF([.A95]=0;0;(IPMT([.$C$3];[.A95];[.$C$4];-[.$C$2])))" office:value-type="float" office:value="0" calcext:value-type="float">
            <text:p>0.00</text:p>
          </table:table-cell>
          <table:table-cell table:style-name="ce373" table:formula="of:=IF([.A95]=0;0;(PMT([.$C$3];[.$C$4];-[.$C$2])))" office:value-type="float" office:value="0" calcext:value-type="float">
            <text:p>0.00</text:p>
          </table:table-cell>
          <table:table-cell table:style-name="ce373" table:formula="of:=IF([.A95]=0;0;([.$C$2]-[.F95]))" office:value-type="float" office:value="0" calcext:value-type="float">
            <text:p>0.00</text:p>
          </table:table-cell>
          <table:table-cell table:style-name="ce373" table:formula="of:=IF([.A95]=0;0;([.B95]+[.F9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5]&gt;=[.$C$4];0;IF([.A95]=0;0;(1+[.A95])))" office:value-type="float" office:value="0" calcext:value-type="float">
            <text:p>0</text:p>
          </table:table-cell>
          <table:table-cell table:style-name="ce373" table:formula="of:=IF([.A96]=0;0;(PPMT([.$C$3];[.A96];[.$C$4];-[.$C$2])))" office:value-type="float" office:value="0" calcext:value-type="float">
            <text:p>0.00</text:p>
          </table:table-cell>
          <table:table-cell table:style-name="ce373" table:formula="of:=IF([.A96]=0;0;(IPMT([.$C$3];[.A96];[.$C$4];-[.$C$2])))" office:value-type="float" office:value="0" calcext:value-type="float">
            <text:p>0.00</text:p>
          </table:table-cell>
          <table:table-cell table:style-name="ce373" table:formula="of:=IF([.A96]=0;0;(PMT([.$C$3];[.$C$4];-[.$C$2])))" office:value-type="float" office:value="0" calcext:value-type="float">
            <text:p>0.00</text:p>
          </table:table-cell>
          <table:table-cell table:style-name="ce373" table:formula="of:=IF([.A96]=0;0;([.$C$2]-[.F96]))" office:value-type="float" office:value="0" calcext:value-type="float">
            <text:p>0.00</text:p>
          </table:table-cell>
          <table:table-cell table:style-name="ce373" table:formula="of:=IF([.A96]=0;0;([.B96]+[.F9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6]&gt;=[.$C$4];0;IF([.A96]=0;0;(1+[.A96])))" office:value-type="float" office:value="0" calcext:value-type="float">
            <text:p>0</text:p>
          </table:table-cell>
          <table:table-cell table:style-name="ce373" table:formula="of:=IF([.A97]=0;0;(PPMT([.$C$3];[.A97];[.$C$4];-[.$C$2])))" office:value-type="float" office:value="0" calcext:value-type="float">
            <text:p>0.00</text:p>
          </table:table-cell>
          <table:table-cell table:style-name="ce373" table:formula="of:=IF([.A97]=0;0;(IPMT([.$C$3];[.A97];[.$C$4];-[.$C$2])))" office:value-type="float" office:value="0" calcext:value-type="float">
            <text:p>0.00</text:p>
          </table:table-cell>
          <table:table-cell table:style-name="ce373" table:formula="of:=IF([.A97]=0;0;(PMT([.$C$3];[.$C$4];-[.$C$2])))" office:value-type="float" office:value="0" calcext:value-type="float">
            <text:p>0.00</text:p>
          </table:table-cell>
          <table:table-cell table:style-name="ce373" table:formula="of:=IF([.A97]=0;0;([.$C$2]-[.F97]))" office:value-type="float" office:value="0" calcext:value-type="float">
            <text:p>0.00</text:p>
          </table:table-cell>
          <table:table-cell table:style-name="ce373" table:formula="of:=IF([.A97]=0;0;([.B97]+[.F9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7]&gt;=[.$C$4];0;IF([.A97]=0;0;(1+[.A97])))" office:value-type="float" office:value="0" calcext:value-type="float">
            <text:p>0</text:p>
          </table:table-cell>
          <table:table-cell table:style-name="ce373" table:formula="of:=IF([.A98]=0;0;(PPMT([.$C$3];[.A98];[.$C$4];-[.$C$2])))" office:value-type="float" office:value="0" calcext:value-type="float">
            <text:p>0.00</text:p>
          </table:table-cell>
          <table:table-cell table:style-name="ce373" table:formula="of:=IF([.A98]=0;0;(IPMT([.$C$3];[.A98];[.$C$4];-[.$C$2])))" office:value-type="float" office:value="0" calcext:value-type="float">
            <text:p>0.00</text:p>
          </table:table-cell>
          <table:table-cell table:style-name="ce373" table:formula="of:=IF([.A98]=0;0;(PMT([.$C$3];[.$C$4];-[.$C$2])))" office:value-type="float" office:value="0" calcext:value-type="float">
            <text:p>0.00</text:p>
          </table:table-cell>
          <table:table-cell table:style-name="ce373" table:formula="of:=IF([.A98]=0;0;([.$C$2]-[.F98]))" office:value-type="float" office:value="0" calcext:value-type="float">
            <text:p>0.00</text:p>
          </table:table-cell>
          <table:table-cell table:style-name="ce373" table:formula="of:=IF([.A98]=0;0;([.B98]+[.F9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8]&gt;=[.$C$4];0;IF([.A98]=0;0;(1+[.A98])))" office:value-type="float" office:value="0" calcext:value-type="float">
            <text:p>0</text:p>
          </table:table-cell>
          <table:table-cell table:style-name="ce373" table:formula="of:=IF([.A99]=0;0;(PPMT([.$C$3];[.A99];[.$C$4];-[.$C$2])))" office:value-type="float" office:value="0" calcext:value-type="float">
            <text:p>0.00</text:p>
          </table:table-cell>
          <table:table-cell table:style-name="ce373" table:formula="of:=IF([.A99]=0;0;(IPMT([.$C$3];[.A99];[.$C$4];-[.$C$2])))" office:value-type="float" office:value="0" calcext:value-type="float">
            <text:p>0.00</text:p>
          </table:table-cell>
          <table:table-cell table:style-name="ce373" table:formula="of:=IF([.A99]=0;0;(PMT([.$C$3];[.$C$4];-[.$C$2])))" office:value-type="float" office:value="0" calcext:value-type="float">
            <text:p>0.00</text:p>
          </table:table-cell>
          <table:table-cell table:style-name="ce373" table:formula="of:=IF([.A99]=0;0;([.$C$2]-[.F99]))" office:value-type="float" office:value="0" calcext:value-type="float">
            <text:p>0.00</text:p>
          </table:table-cell>
          <table:table-cell table:style-name="ce373" table:formula="of:=IF([.A99]=0;0;([.B99]+[.F9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99]&gt;=[.$C$4];0;IF([.A99]=0;0;(1+[.A99])))" office:value-type="float" office:value="0" calcext:value-type="float">
            <text:p>0</text:p>
          </table:table-cell>
          <table:table-cell table:style-name="ce373" table:formula="of:=IF([.A100]=0;0;(PPMT([.$C$3];[.A100];[.$C$4];-[.$C$2])))" office:value-type="float" office:value="0" calcext:value-type="float">
            <text:p>0.00</text:p>
          </table:table-cell>
          <table:table-cell table:style-name="ce373" table:formula="of:=IF([.A100]=0;0;(IPMT([.$C$3];[.A100];[.$C$4];-[.$C$2])))" office:value-type="float" office:value="0" calcext:value-type="float">
            <text:p>0.00</text:p>
          </table:table-cell>
          <table:table-cell table:style-name="ce373" table:formula="of:=IF([.A100]=0;0;(PMT([.$C$3];[.$C$4];-[.$C$2])))" office:value-type="float" office:value="0" calcext:value-type="float">
            <text:p>0.00</text:p>
          </table:table-cell>
          <table:table-cell table:style-name="ce373" table:formula="of:=IF([.A100]=0;0;([.$C$2]-[.F100]))" office:value-type="float" office:value="0" calcext:value-type="float">
            <text:p>0.00</text:p>
          </table:table-cell>
          <table:table-cell table:style-name="ce373" table:formula="of:=IF([.A100]=0;0;([.B100]+[.F9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0]&gt;=[.$C$4];0;IF([.A100]=0;0;(1+[.A100])))" office:value-type="float" office:value="0" calcext:value-type="float">
            <text:p>0</text:p>
          </table:table-cell>
          <table:table-cell table:style-name="ce373" table:formula="of:=IF([.A101]=0;0;(PPMT([.$C$3];[.A101];[.$C$4];-[.$C$2])))" office:value-type="float" office:value="0" calcext:value-type="float">
            <text:p>0.00</text:p>
          </table:table-cell>
          <table:table-cell table:style-name="ce373" table:formula="of:=IF([.A101]=0;0;(IPMT([.$C$3];[.A101];[.$C$4];-[.$C$2])))" office:value-type="float" office:value="0" calcext:value-type="float">
            <text:p>0.00</text:p>
          </table:table-cell>
          <table:table-cell table:style-name="ce373" table:formula="of:=IF([.A101]=0;0;(PMT([.$C$3];[.$C$4];-[.$C$2])))" office:value-type="float" office:value="0" calcext:value-type="float">
            <text:p>0.00</text:p>
          </table:table-cell>
          <table:table-cell table:style-name="ce373" table:formula="of:=IF([.A101]=0;0;([.$C$2]-[.F101]))" office:value-type="float" office:value="0" calcext:value-type="float">
            <text:p>0.00</text:p>
          </table:table-cell>
          <table:table-cell table:style-name="ce373" table:formula="of:=IF([.A101]=0;0;([.B101]+[.F10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1]&gt;=[.$C$4];0;IF([.A101]=0;0;(1+[.A101])))" office:value-type="float" office:value="0" calcext:value-type="float">
            <text:p>0</text:p>
          </table:table-cell>
          <table:table-cell table:style-name="ce373" table:formula="of:=IF([.A102]=0;0;(PPMT([.$C$3];[.A102];[.$C$4];-[.$C$2])))" office:value-type="float" office:value="0" calcext:value-type="float">
            <text:p>0.00</text:p>
          </table:table-cell>
          <table:table-cell table:style-name="ce373" table:formula="of:=IF([.A102]=0;0;(IPMT([.$C$3];[.A102];[.$C$4];-[.$C$2])))" office:value-type="float" office:value="0" calcext:value-type="float">
            <text:p>0.00</text:p>
          </table:table-cell>
          <table:table-cell table:style-name="ce373" table:formula="of:=IF([.A102]=0;0;(PMT([.$C$3];[.$C$4];-[.$C$2])))" office:value-type="float" office:value="0" calcext:value-type="float">
            <text:p>0.00</text:p>
          </table:table-cell>
          <table:table-cell table:style-name="ce373" table:formula="of:=IF([.A102]=0;0;([.$C$2]-[.F102]))" office:value-type="float" office:value="0" calcext:value-type="float">
            <text:p>0.00</text:p>
          </table:table-cell>
          <table:table-cell table:style-name="ce373" table:formula="of:=IF([.A102]=0;0;([.B102]+[.F10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2]&gt;=[.$C$4];0;IF([.A102]=0;0;(1+[.A102])))" office:value-type="float" office:value="0" calcext:value-type="float">
            <text:p>0</text:p>
          </table:table-cell>
          <table:table-cell table:style-name="ce373" table:formula="of:=IF([.A103]=0;0;(PPMT([.$C$3];[.A103];[.$C$4];-[.$C$2])))" office:value-type="float" office:value="0" calcext:value-type="float">
            <text:p>0.00</text:p>
          </table:table-cell>
          <table:table-cell table:style-name="ce373" table:formula="of:=IF([.A103]=0;0;(IPMT([.$C$3];[.A103];[.$C$4];-[.$C$2])))" office:value-type="float" office:value="0" calcext:value-type="float">
            <text:p>0.00</text:p>
          </table:table-cell>
          <table:table-cell table:style-name="ce373" table:formula="of:=IF([.A103]=0;0;(PMT([.$C$3];[.$C$4];-[.$C$2])))" office:value-type="float" office:value="0" calcext:value-type="float">
            <text:p>0.00</text:p>
          </table:table-cell>
          <table:table-cell table:style-name="ce373" table:formula="of:=IF([.A103]=0;0;([.$C$2]-[.F103]))" office:value-type="float" office:value="0" calcext:value-type="float">
            <text:p>0.00</text:p>
          </table:table-cell>
          <table:table-cell table:style-name="ce373" table:formula="of:=IF([.A103]=0;0;([.B103]+[.F10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3]&gt;=[.$C$4];0;IF([.A103]=0;0;(1+[.A103])))" office:value-type="float" office:value="0" calcext:value-type="float">
            <text:p>0</text:p>
          </table:table-cell>
          <table:table-cell table:style-name="ce373" table:formula="of:=IF([.A104]=0;0;(PPMT([.$C$3];[.A104];[.$C$4];-[.$C$2])))" office:value-type="float" office:value="0" calcext:value-type="float">
            <text:p>0.00</text:p>
          </table:table-cell>
          <table:table-cell table:style-name="ce373" table:formula="of:=IF([.A104]=0;0;(IPMT([.$C$3];[.A104];[.$C$4];-[.$C$2])))" office:value-type="float" office:value="0" calcext:value-type="float">
            <text:p>0.00</text:p>
          </table:table-cell>
          <table:table-cell table:style-name="ce373" table:formula="of:=IF([.A104]=0;0;(PMT([.$C$3];[.$C$4];-[.$C$2])))" office:value-type="float" office:value="0" calcext:value-type="float">
            <text:p>0.00</text:p>
          </table:table-cell>
          <table:table-cell table:style-name="ce373" table:formula="of:=IF([.A104]=0;0;([.$C$2]-[.F104]))" office:value-type="float" office:value="0" calcext:value-type="float">
            <text:p>0.00</text:p>
          </table:table-cell>
          <table:table-cell table:style-name="ce373" table:formula="of:=IF([.A104]=0;0;([.B104]+[.F10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4]&gt;=[.$C$4];0;IF([.A104]=0;0;(1+[.A104])))" office:value-type="float" office:value="0" calcext:value-type="float">
            <text:p>0</text:p>
          </table:table-cell>
          <table:table-cell table:style-name="ce373" table:formula="of:=IF([.A105]=0;0;(PPMT([.$C$3];[.A105];[.$C$4];-[.$C$2])))" office:value-type="float" office:value="0" calcext:value-type="float">
            <text:p>0.00</text:p>
          </table:table-cell>
          <table:table-cell table:style-name="ce373" table:formula="of:=IF([.A105]=0;0;(IPMT([.$C$3];[.A105];[.$C$4];-[.$C$2])))" office:value-type="float" office:value="0" calcext:value-type="float">
            <text:p>0.00</text:p>
          </table:table-cell>
          <table:table-cell table:style-name="ce373" table:formula="of:=IF([.A105]=0;0;(PMT([.$C$3];[.$C$4];-[.$C$2])))" office:value-type="float" office:value="0" calcext:value-type="float">
            <text:p>0.00</text:p>
          </table:table-cell>
          <table:table-cell table:style-name="ce373" table:formula="of:=IF([.A105]=0;0;([.$C$2]-[.F105]))" office:value-type="float" office:value="0" calcext:value-type="float">
            <text:p>0.00</text:p>
          </table:table-cell>
          <table:table-cell table:style-name="ce373" table:formula="of:=IF([.A105]=0;0;([.B105]+[.F10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5]&gt;=[.$C$4];0;IF([.A105]=0;0;(1+[.A105])))" office:value-type="float" office:value="0" calcext:value-type="float">
            <text:p>0</text:p>
          </table:table-cell>
          <table:table-cell table:style-name="ce373" table:formula="of:=IF([.A106]=0;0;(PPMT([.$C$3];[.A106];[.$C$4];-[.$C$2])))" office:value-type="float" office:value="0" calcext:value-type="float">
            <text:p>0.00</text:p>
          </table:table-cell>
          <table:table-cell table:style-name="ce373" table:formula="of:=IF([.A106]=0;0;(IPMT([.$C$3];[.A106];[.$C$4];-[.$C$2])))" office:value-type="float" office:value="0" calcext:value-type="float">
            <text:p>0.00</text:p>
          </table:table-cell>
          <table:table-cell table:style-name="ce373" table:formula="of:=IF([.A106]=0;0;(PMT([.$C$3];[.$C$4];-[.$C$2])))" office:value-type="float" office:value="0" calcext:value-type="float">
            <text:p>0.00</text:p>
          </table:table-cell>
          <table:table-cell table:style-name="ce373" table:formula="of:=IF([.A106]=0;0;([.$C$2]-[.F106]))" office:value-type="float" office:value="0" calcext:value-type="float">
            <text:p>0.00</text:p>
          </table:table-cell>
          <table:table-cell table:style-name="ce373" table:formula="of:=IF([.A106]=0;0;([.B106]+[.F10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6]&gt;=[.$C$4];0;IF([.A106]=0;0;(1+[.A106])))" office:value-type="float" office:value="0" calcext:value-type="float">
            <text:p>0</text:p>
          </table:table-cell>
          <table:table-cell table:style-name="ce373" table:formula="of:=IF([.A107]=0;0;(PPMT([.$C$3];[.A107];[.$C$4];-[.$C$2])))" office:value-type="float" office:value="0" calcext:value-type="float">
            <text:p>0.00</text:p>
          </table:table-cell>
          <table:table-cell table:style-name="ce373" table:formula="of:=IF([.A107]=0;0;(IPMT([.$C$3];[.A107];[.$C$4];-[.$C$2])))" office:value-type="float" office:value="0" calcext:value-type="float">
            <text:p>0.00</text:p>
          </table:table-cell>
          <table:table-cell table:style-name="ce373" table:formula="of:=IF([.A107]=0;0;(PMT([.$C$3];[.$C$4];-[.$C$2])))" office:value-type="float" office:value="0" calcext:value-type="float">
            <text:p>0.00</text:p>
          </table:table-cell>
          <table:table-cell table:style-name="ce373" table:formula="of:=IF([.A107]=0;0;([.$C$2]-[.F107]))" office:value-type="float" office:value="0" calcext:value-type="float">
            <text:p>0.00</text:p>
          </table:table-cell>
          <table:table-cell table:style-name="ce373" table:formula="of:=IF([.A107]=0;0;([.B107]+[.F10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7]&gt;=[.$C$4];0;IF([.A107]=0;0;(1+[.A107])))" office:value-type="float" office:value="0" calcext:value-type="float">
            <text:p>0</text:p>
          </table:table-cell>
          <table:table-cell table:style-name="ce373" table:formula="of:=IF([.A108]=0;0;(PPMT([.$C$3];[.A108];[.$C$4];-[.$C$2])))" office:value-type="float" office:value="0" calcext:value-type="float">
            <text:p>0.00</text:p>
          </table:table-cell>
          <table:table-cell table:style-name="ce373" table:formula="of:=IF([.A108]=0;0;(IPMT([.$C$3];[.A108];[.$C$4];-[.$C$2])))" office:value-type="float" office:value="0" calcext:value-type="float">
            <text:p>0.00</text:p>
          </table:table-cell>
          <table:table-cell table:style-name="ce373" table:formula="of:=IF([.A108]=0;0;(PMT([.$C$3];[.$C$4];-[.$C$2])))" office:value-type="float" office:value="0" calcext:value-type="float">
            <text:p>0.00</text:p>
          </table:table-cell>
          <table:table-cell table:style-name="ce373" table:formula="of:=IF([.A108]=0;0;([.$C$2]-[.F108]))" office:value-type="float" office:value="0" calcext:value-type="float">
            <text:p>0.00</text:p>
          </table:table-cell>
          <table:table-cell table:style-name="ce373" table:formula="of:=IF([.A108]=0;0;([.B108]+[.F10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8]&gt;=[.$C$4];0;IF([.A108]=0;0;(1+[.A108])))" office:value-type="float" office:value="0" calcext:value-type="float">
            <text:p>0</text:p>
          </table:table-cell>
          <table:table-cell table:style-name="ce373" table:formula="of:=IF([.A109]=0;0;(PPMT([.$C$3];[.A109];[.$C$4];-[.$C$2])))" office:value-type="float" office:value="0" calcext:value-type="float">
            <text:p>0.00</text:p>
          </table:table-cell>
          <table:table-cell table:style-name="ce373" table:formula="of:=IF([.A109]=0;0;(IPMT([.$C$3];[.A109];[.$C$4];-[.$C$2])))" office:value-type="float" office:value="0" calcext:value-type="float">
            <text:p>0.00</text:p>
          </table:table-cell>
          <table:table-cell table:style-name="ce373" table:formula="of:=IF([.A109]=0;0;(PMT([.$C$3];[.$C$4];-[.$C$2])))" office:value-type="float" office:value="0" calcext:value-type="float">
            <text:p>0.00</text:p>
          </table:table-cell>
          <table:table-cell table:style-name="ce373" table:formula="of:=IF([.A109]=0;0;([.$C$2]-[.F109]))" office:value-type="float" office:value="0" calcext:value-type="float">
            <text:p>0.00</text:p>
          </table:table-cell>
          <table:table-cell table:style-name="ce373" table:formula="of:=IF([.A109]=0;0;([.B109]+[.F10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09]&gt;=[.$C$4];0;IF([.A109]=0;0;(1+[.A109])))" office:value-type="float" office:value="0" calcext:value-type="float">
            <text:p>0</text:p>
          </table:table-cell>
          <table:table-cell table:style-name="ce373" table:formula="of:=IF([.A110]=0;0;(PPMT([.$C$3];[.A110];[.$C$4];-[.$C$2])))" office:value-type="float" office:value="0" calcext:value-type="float">
            <text:p>0.00</text:p>
          </table:table-cell>
          <table:table-cell table:style-name="ce373" table:formula="of:=IF([.A110]=0;0;(IPMT([.$C$3];[.A110];[.$C$4];-[.$C$2])))" office:value-type="float" office:value="0" calcext:value-type="float">
            <text:p>0.00</text:p>
          </table:table-cell>
          <table:table-cell table:style-name="ce373" table:formula="of:=IF([.A110]=0;0;(PMT([.$C$3];[.$C$4];-[.$C$2])))" office:value-type="float" office:value="0" calcext:value-type="float">
            <text:p>0.00</text:p>
          </table:table-cell>
          <table:table-cell table:style-name="ce373" table:formula="of:=IF([.A110]=0;0;([.$C$2]-[.F110]))" office:value-type="float" office:value="0" calcext:value-type="float">
            <text:p>0.00</text:p>
          </table:table-cell>
          <table:table-cell table:style-name="ce373" table:formula="of:=IF([.A110]=0;0;([.B110]+[.F10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0]&gt;=[.$C$4];0;IF([.A110]=0;0;(1+[.A110])))" office:value-type="float" office:value="0" calcext:value-type="float">
            <text:p>0</text:p>
          </table:table-cell>
          <table:table-cell table:style-name="ce373" table:formula="of:=IF([.A111]=0;0;(PPMT([.$C$3];[.A111];[.$C$4];-[.$C$2])))" office:value-type="float" office:value="0" calcext:value-type="float">
            <text:p>0.00</text:p>
          </table:table-cell>
          <table:table-cell table:style-name="ce373" table:formula="of:=IF([.A111]=0;0;(IPMT([.$C$3];[.A111];[.$C$4];-[.$C$2])))" office:value-type="float" office:value="0" calcext:value-type="float">
            <text:p>0.00</text:p>
          </table:table-cell>
          <table:table-cell table:style-name="ce373" table:formula="of:=IF([.A111]=0;0;(PMT([.$C$3];[.$C$4];-[.$C$2])))" office:value-type="float" office:value="0" calcext:value-type="float">
            <text:p>0.00</text:p>
          </table:table-cell>
          <table:table-cell table:style-name="ce373" table:formula="of:=IF([.A111]=0;0;([.$C$2]-[.F111]))" office:value-type="float" office:value="0" calcext:value-type="float">
            <text:p>0.00</text:p>
          </table:table-cell>
          <table:table-cell table:style-name="ce373" table:formula="of:=IF([.A111]=0;0;([.B111]+[.F11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1]&gt;=[.$C$4];0;IF([.A111]=0;0;(1+[.A111])))" office:value-type="float" office:value="0" calcext:value-type="float">
            <text:p>0</text:p>
          </table:table-cell>
          <table:table-cell table:style-name="ce373" table:formula="of:=IF([.A112]=0;0;(PPMT([.$C$3];[.A112];[.$C$4];-[.$C$2])))" office:value-type="float" office:value="0" calcext:value-type="float">
            <text:p>0.00</text:p>
          </table:table-cell>
          <table:table-cell table:style-name="ce373" table:formula="of:=IF([.A112]=0;0;(IPMT([.$C$3];[.A112];[.$C$4];-[.$C$2])))" office:value-type="float" office:value="0" calcext:value-type="float">
            <text:p>0.00</text:p>
          </table:table-cell>
          <table:table-cell table:style-name="ce373" table:formula="of:=IF([.A112]=0;0;(PMT([.$C$3];[.$C$4];-[.$C$2])))" office:value-type="float" office:value="0" calcext:value-type="float">
            <text:p>0.00</text:p>
          </table:table-cell>
          <table:table-cell table:style-name="ce373" table:formula="of:=IF([.A112]=0;0;([.$C$2]-[.F112]))" office:value-type="float" office:value="0" calcext:value-type="float">
            <text:p>0.00</text:p>
          </table:table-cell>
          <table:table-cell table:style-name="ce373" table:formula="of:=IF([.A112]=0;0;([.B112]+[.F11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2]&gt;=[.$C$4];0;IF([.A112]=0;0;(1+[.A112])))" office:value-type="float" office:value="0" calcext:value-type="float">
            <text:p>0</text:p>
          </table:table-cell>
          <table:table-cell table:style-name="ce373" table:formula="of:=IF([.A113]=0;0;(PPMT([.$C$3];[.A113];[.$C$4];-[.$C$2])))" office:value-type="float" office:value="0" calcext:value-type="float">
            <text:p>0.00</text:p>
          </table:table-cell>
          <table:table-cell table:style-name="ce373" table:formula="of:=IF([.A113]=0;0;(IPMT([.$C$3];[.A113];[.$C$4];-[.$C$2])))" office:value-type="float" office:value="0" calcext:value-type="float">
            <text:p>0.00</text:p>
          </table:table-cell>
          <table:table-cell table:style-name="ce373" table:formula="of:=IF([.A113]=0;0;(PMT([.$C$3];[.$C$4];-[.$C$2])))" office:value-type="float" office:value="0" calcext:value-type="float">
            <text:p>0.00</text:p>
          </table:table-cell>
          <table:table-cell table:style-name="ce373" table:formula="of:=IF([.A113]=0;0;([.$C$2]-[.F113]))" office:value-type="float" office:value="0" calcext:value-type="float">
            <text:p>0.00</text:p>
          </table:table-cell>
          <table:table-cell table:style-name="ce373" table:formula="of:=IF([.A113]=0;0;([.B113]+[.F11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3]&gt;=[.$C$4];0;IF([.A113]=0;0;(1+[.A113])))" office:value-type="float" office:value="0" calcext:value-type="float">
            <text:p>0</text:p>
          </table:table-cell>
          <table:table-cell table:style-name="ce373" table:formula="of:=IF([.A114]=0;0;(PPMT([.$C$3];[.A114];[.$C$4];-[.$C$2])))" office:value-type="float" office:value="0" calcext:value-type="float">
            <text:p>0.00</text:p>
          </table:table-cell>
          <table:table-cell table:style-name="ce373" table:formula="of:=IF([.A114]=0;0;(IPMT([.$C$3];[.A114];[.$C$4];-[.$C$2])))" office:value-type="float" office:value="0" calcext:value-type="float">
            <text:p>0.00</text:p>
          </table:table-cell>
          <table:table-cell table:style-name="ce373" table:formula="of:=IF([.A114]=0;0;(PMT([.$C$3];[.$C$4];-[.$C$2])))" office:value-type="float" office:value="0" calcext:value-type="float">
            <text:p>0.00</text:p>
          </table:table-cell>
          <table:table-cell table:style-name="ce373" table:formula="of:=IF([.A114]=0;0;([.$C$2]-[.F114]))" office:value-type="float" office:value="0" calcext:value-type="float">
            <text:p>0.00</text:p>
          </table:table-cell>
          <table:table-cell table:style-name="ce373" table:formula="of:=IF([.A114]=0;0;([.B114]+[.F11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4]&gt;=[.$C$4];0;IF([.A114]=0;0;(1+[.A114])))" office:value-type="float" office:value="0" calcext:value-type="float">
            <text:p>0</text:p>
          </table:table-cell>
          <table:table-cell table:style-name="ce373" table:formula="of:=IF([.A115]=0;0;(PPMT([.$C$3];[.A115];[.$C$4];-[.$C$2])))" office:value-type="float" office:value="0" calcext:value-type="float">
            <text:p>0.00</text:p>
          </table:table-cell>
          <table:table-cell table:style-name="ce373" table:formula="of:=IF([.A115]=0;0;(IPMT([.$C$3];[.A115];[.$C$4];-[.$C$2])))" office:value-type="float" office:value="0" calcext:value-type="float">
            <text:p>0.00</text:p>
          </table:table-cell>
          <table:table-cell table:style-name="ce373" table:formula="of:=IF([.A115]=0;0;(PMT([.$C$3];[.$C$4];-[.$C$2])))" office:value-type="float" office:value="0" calcext:value-type="float">
            <text:p>0.00</text:p>
          </table:table-cell>
          <table:table-cell table:style-name="ce373" table:formula="of:=IF([.A115]=0;0;([.$C$2]-[.F115]))" office:value-type="float" office:value="0" calcext:value-type="float">
            <text:p>0.00</text:p>
          </table:table-cell>
          <table:table-cell table:style-name="ce373" table:formula="of:=IF([.A115]=0;0;([.B115]+[.F11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5]&gt;=[.$C$4];0;IF([.A115]=0;0;(1+[.A115])))" office:value-type="float" office:value="0" calcext:value-type="float">
            <text:p>0</text:p>
          </table:table-cell>
          <table:table-cell table:style-name="ce373" table:formula="of:=IF([.A116]=0;0;(PPMT([.$C$3];[.A116];[.$C$4];-[.$C$2])))" office:value-type="float" office:value="0" calcext:value-type="float">
            <text:p>0.00</text:p>
          </table:table-cell>
          <table:table-cell table:style-name="ce373" table:formula="of:=IF([.A116]=0;0;(IPMT([.$C$3];[.A116];[.$C$4];-[.$C$2])))" office:value-type="float" office:value="0" calcext:value-type="float">
            <text:p>0.00</text:p>
          </table:table-cell>
          <table:table-cell table:style-name="ce373" table:formula="of:=IF([.A116]=0;0;(PMT([.$C$3];[.$C$4];-[.$C$2])))" office:value-type="float" office:value="0" calcext:value-type="float">
            <text:p>0.00</text:p>
          </table:table-cell>
          <table:table-cell table:style-name="ce373" table:formula="of:=IF([.A116]=0;0;([.$C$2]-[.F116]))" office:value-type="float" office:value="0" calcext:value-type="float">
            <text:p>0.00</text:p>
          </table:table-cell>
          <table:table-cell table:style-name="ce373" table:formula="of:=IF([.A116]=0;0;([.B116]+[.F11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6]&gt;=[.$C$4];0;IF([.A116]=0;0;(1+[.A116])))" office:value-type="float" office:value="0" calcext:value-type="float">
            <text:p>0</text:p>
          </table:table-cell>
          <table:table-cell table:style-name="ce373" table:formula="of:=IF([.A117]=0;0;(PPMT([.$C$3];[.A117];[.$C$4];-[.$C$2])))" office:value-type="float" office:value="0" calcext:value-type="float">
            <text:p>0.00</text:p>
          </table:table-cell>
          <table:table-cell table:style-name="ce373" table:formula="of:=IF([.A117]=0;0;(IPMT([.$C$3];[.A117];[.$C$4];-[.$C$2])))" office:value-type="float" office:value="0" calcext:value-type="float">
            <text:p>0.00</text:p>
          </table:table-cell>
          <table:table-cell table:style-name="ce373" table:formula="of:=IF([.A117]=0;0;(PMT([.$C$3];[.$C$4];-[.$C$2])))" office:value-type="float" office:value="0" calcext:value-type="float">
            <text:p>0.00</text:p>
          </table:table-cell>
          <table:table-cell table:style-name="ce373" table:formula="of:=IF([.A117]=0;0;([.$C$2]-[.F117]))" office:value-type="float" office:value="0" calcext:value-type="float">
            <text:p>0.00</text:p>
          </table:table-cell>
          <table:table-cell table:style-name="ce373" table:formula="of:=IF([.A117]=0;0;([.B117]+[.F11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7]&gt;=[.$C$4];0;IF([.A117]=0;0;(1+[.A117])))" office:value-type="float" office:value="0" calcext:value-type="float">
            <text:p>0</text:p>
          </table:table-cell>
          <table:table-cell table:style-name="ce373" table:formula="of:=IF([.A118]=0;0;(PPMT([.$C$3];[.A118];[.$C$4];-[.$C$2])))" office:value-type="float" office:value="0" calcext:value-type="float">
            <text:p>0.00</text:p>
          </table:table-cell>
          <table:table-cell table:style-name="ce373" table:formula="of:=IF([.A118]=0;0;(IPMT([.$C$3];[.A118];[.$C$4];-[.$C$2])))" office:value-type="float" office:value="0" calcext:value-type="float">
            <text:p>0.00</text:p>
          </table:table-cell>
          <table:table-cell table:style-name="ce373" table:formula="of:=IF([.A118]=0;0;(PMT([.$C$3];[.$C$4];-[.$C$2])))" office:value-type="float" office:value="0" calcext:value-type="float">
            <text:p>0.00</text:p>
          </table:table-cell>
          <table:table-cell table:style-name="ce373" table:formula="of:=IF([.A118]=0;0;([.$C$2]-[.F118]))" office:value-type="float" office:value="0" calcext:value-type="float">
            <text:p>0.00</text:p>
          </table:table-cell>
          <table:table-cell table:style-name="ce373" table:formula="of:=IF([.A118]=0;0;([.B118]+[.F11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8]&gt;=[.$C$4];0;IF([.A118]=0;0;(1+[.A118])))" office:value-type="float" office:value="0" calcext:value-type="float">
            <text:p>0</text:p>
          </table:table-cell>
          <table:table-cell table:style-name="ce373" table:formula="of:=IF([.A119]=0;0;(PPMT([.$C$3];[.A119];[.$C$4];-[.$C$2])))" office:value-type="float" office:value="0" calcext:value-type="float">
            <text:p>0.00</text:p>
          </table:table-cell>
          <table:table-cell table:style-name="ce373" table:formula="of:=IF([.A119]=0;0;(IPMT([.$C$3];[.A119];[.$C$4];-[.$C$2])))" office:value-type="float" office:value="0" calcext:value-type="float">
            <text:p>0.00</text:p>
          </table:table-cell>
          <table:table-cell table:style-name="ce373" table:formula="of:=IF([.A119]=0;0;(PMT([.$C$3];[.$C$4];-[.$C$2])))" office:value-type="float" office:value="0" calcext:value-type="float">
            <text:p>0.00</text:p>
          </table:table-cell>
          <table:table-cell table:style-name="ce373" table:formula="of:=IF([.A119]=0;0;([.$C$2]-[.F119]))" office:value-type="float" office:value="0" calcext:value-type="float">
            <text:p>0.00</text:p>
          </table:table-cell>
          <table:table-cell table:style-name="ce373" table:formula="of:=IF([.A119]=0;0;([.B119]+[.F11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19]&gt;=[.$C$4];0;IF([.A119]=0;0;(1+[.A119])))" office:value-type="float" office:value="0" calcext:value-type="float">
            <text:p>0</text:p>
          </table:table-cell>
          <table:table-cell table:style-name="ce373" table:formula="of:=IF([.A120]=0;0;(PPMT([.$C$3];[.A120];[.$C$4];-[.$C$2])))" office:value-type="float" office:value="0" calcext:value-type="float">
            <text:p>0.00</text:p>
          </table:table-cell>
          <table:table-cell table:style-name="ce373" table:formula="of:=IF([.A120]=0;0;(IPMT([.$C$3];[.A120];[.$C$4];-[.$C$2])))" office:value-type="float" office:value="0" calcext:value-type="float">
            <text:p>0.00</text:p>
          </table:table-cell>
          <table:table-cell table:style-name="ce373" table:formula="of:=IF([.A120]=0;0;(PMT([.$C$3];[.$C$4];-[.$C$2])))" office:value-type="float" office:value="0" calcext:value-type="float">
            <text:p>0.00</text:p>
          </table:table-cell>
          <table:table-cell table:style-name="ce373" table:formula="of:=IF([.A120]=0;0;([.$C$2]-[.F120]))" office:value-type="float" office:value="0" calcext:value-type="float">
            <text:p>0.00</text:p>
          </table:table-cell>
          <table:table-cell table:style-name="ce373" table:formula="of:=IF([.A120]=0;0;([.B120]+[.F11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0]&gt;=[.$C$4];0;IF([.A120]=0;0;(1+[.A120])))" office:value-type="float" office:value="0" calcext:value-type="float">
            <text:p>0</text:p>
          </table:table-cell>
          <table:table-cell table:style-name="ce373" table:formula="of:=IF([.A121]=0;0;(PPMT([.$C$3];[.A121];[.$C$4];-[.$C$2])))" office:value-type="float" office:value="0" calcext:value-type="float">
            <text:p>0.00</text:p>
          </table:table-cell>
          <table:table-cell table:style-name="ce373" table:formula="of:=IF([.A121]=0;0;(IPMT([.$C$3];[.A121];[.$C$4];-[.$C$2])))" office:value-type="float" office:value="0" calcext:value-type="float">
            <text:p>0.00</text:p>
          </table:table-cell>
          <table:table-cell table:style-name="ce373" table:formula="of:=IF([.A121]=0;0;(PMT([.$C$3];[.$C$4];-[.$C$2])))" office:value-type="float" office:value="0" calcext:value-type="float">
            <text:p>0.00</text:p>
          </table:table-cell>
          <table:table-cell table:style-name="ce373" table:formula="of:=IF([.A121]=0;0;([.$C$2]-[.F121]))" office:value-type="float" office:value="0" calcext:value-type="float">
            <text:p>0.00</text:p>
          </table:table-cell>
          <table:table-cell table:style-name="ce373" table:formula="of:=IF([.A121]=0;0;([.B121]+[.F12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1]&gt;=[.$C$4];0;IF([.A121]=0;0;(1+[.A121])))" office:value-type="float" office:value="0" calcext:value-type="float">
            <text:p>0</text:p>
          </table:table-cell>
          <table:table-cell table:style-name="ce373" table:formula="of:=IF([.A122]=0;0;(PPMT([.$C$3];[.A122];[.$C$4];-[.$C$2])))" office:value-type="float" office:value="0" calcext:value-type="float">
            <text:p>0.00</text:p>
          </table:table-cell>
          <table:table-cell table:style-name="ce373" table:formula="of:=IF([.A122]=0;0;(IPMT([.$C$3];[.A122];[.$C$4];-[.$C$2])))" office:value-type="float" office:value="0" calcext:value-type="float">
            <text:p>0.00</text:p>
          </table:table-cell>
          <table:table-cell table:style-name="ce373" table:formula="of:=IF([.A122]=0;0;(PMT([.$C$3];[.$C$4];-[.$C$2])))" office:value-type="float" office:value="0" calcext:value-type="float">
            <text:p>0.00</text:p>
          </table:table-cell>
          <table:table-cell table:style-name="ce373" table:formula="of:=IF([.A122]=0;0;([.$C$2]-[.F122]))" office:value-type="float" office:value="0" calcext:value-type="float">
            <text:p>0.00</text:p>
          </table:table-cell>
          <table:table-cell table:style-name="ce373" table:formula="of:=IF([.A122]=0;0;([.B122]+[.F12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2]&gt;=[.$C$4];0;IF([.A122]=0;0;(1+[.A122])))" office:value-type="float" office:value="0" calcext:value-type="float">
            <text:p>0</text:p>
          </table:table-cell>
          <table:table-cell table:style-name="ce373" table:formula="of:=IF([.A123]=0;0;(PPMT([.$C$3];[.A123];[.$C$4];-[.$C$2])))" office:value-type="float" office:value="0" calcext:value-type="float">
            <text:p>0.00</text:p>
          </table:table-cell>
          <table:table-cell table:style-name="ce373" table:formula="of:=IF([.A123]=0;0;(IPMT([.$C$3];[.A123];[.$C$4];-[.$C$2])))" office:value-type="float" office:value="0" calcext:value-type="float">
            <text:p>0.00</text:p>
          </table:table-cell>
          <table:table-cell table:style-name="ce373" table:formula="of:=IF([.A123]=0;0;(PMT([.$C$3];[.$C$4];-[.$C$2])))" office:value-type="float" office:value="0" calcext:value-type="float">
            <text:p>0.00</text:p>
          </table:table-cell>
          <table:table-cell table:style-name="ce373" table:formula="of:=IF([.A123]=0;0;([.$C$2]-[.F123]))" office:value-type="float" office:value="0" calcext:value-type="float">
            <text:p>0.00</text:p>
          </table:table-cell>
          <table:table-cell table:style-name="ce373" table:formula="of:=IF([.A123]=0;0;([.B123]+[.F12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3]&gt;=[.$C$4];0;IF([.A123]=0;0;(1+[.A123])))" office:value-type="float" office:value="0" calcext:value-type="float">
            <text:p>0</text:p>
          </table:table-cell>
          <table:table-cell table:style-name="ce373" table:formula="of:=IF([.A124]=0;0;(PPMT([.$C$3];[.A124];[.$C$4];-[.$C$2])))" office:value-type="float" office:value="0" calcext:value-type="float">
            <text:p>0.00</text:p>
          </table:table-cell>
          <table:table-cell table:style-name="ce373" table:formula="of:=IF([.A124]=0;0;(IPMT([.$C$3];[.A124];[.$C$4];-[.$C$2])))" office:value-type="float" office:value="0" calcext:value-type="float">
            <text:p>0.00</text:p>
          </table:table-cell>
          <table:table-cell table:style-name="ce373" table:formula="of:=IF([.A124]=0;0;(PMT([.$C$3];[.$C$4];-[.$C$2])))" office:value-type="float" office:value="0" calcext:value-type="float">
            <text:p>0.00</text:p>
          </table:table-cell>
          <table:table-cell table:style-name="ce373" table:formula="of:=IF([.A124]=0;0;([.$C$2]-[.F124]))" office:value-type="float" office:value="0" calcext:value-type="float">
            <text:p>0.00</text:p>
          </table:table-cell>
          <table:table-cell table:style-name="ce373" table:formula="of:=IF([.A124]=0;0;([.B124]+[.F12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4]&gt;=[.$C$4];0;IF([.A124]=0;0;(1+[.A124])))" office:value-type="float" office:value="0" calcext:value-type="float">
            <text:p>0</text:p>
          </table:table-cell>
          <table:table-cell table:style-name="ce373" table:formula="of:=IF([.A125]=0;0;(PPMT([.$C$3];[.A125];[.$C$4];-[.$C$2])))" office:value-type="float" office:value="0" calcext:value-type="float">
            <text:p>0.00</text:p>
          </table:table-cell>
          <table:table-cell table:style-name="ce373" table:formula="of:=IF([.A125]=0;0;(IPMT([.$C$3];[.A125];[.$C$4];-[.$C$2])))" office:value-type="float" office:value="0" calcext:value-type="float">
            <text:p>0.00</text:p>
          </table:table-cell>
          <table:table-cell table:style-name="ce373" table:formula="of:=IF([.A125]=0;0;(PMT([.$C$3];[.$C$4];-[.$C$2])))" office:value-type="float" office:value="0" calcext:value-type="float">
            <text:p>0.00</text:p>
          </table:table-cell>
          <table:table-cell table:style-name="ce373" table:formula="of:=IF([.A125]=0;0;([.$C$2]-[.F125]))" office:value-type="float" office:value="0" calcext:value-type="float">
            <text:p>0.00</text:p>
          </table:table-cell>
          <table:table-cell table:style-name="ce373" table:formula="of:=IF([.A125]=0;0;([.B125]+[.F12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5]&gt;=[.$C$4];0;IF([.A125]=0;0;(1+[.A125])))" office:value-type="float" office:value="0" calcext:value-type="float">
            <text:p>0</text:p>
          </table:table-cell>
          <table:table-cell table:style-name="ce373" table:formula="of:=IF([.A126]=0;0;(PPMT([.$C$3];[.A126];[.$C$4];-[.$C$2])))" office:value-type="float" office:value="0" calcext:value-type="float">
            <text:p>0.00</text:p>
          </table:table-cell>
          <table:table-cell table:style-name="ce373" table:formula="of:=IF([.A126]=0;0;(IPMT([.$C$3];[.A126];[.$C$4];-[.$C$2])))" office:value-type="float" office:value="0" calcext:value-type="float">
            <text:p>0.00</text:p>
          </table:table-cell>
          <table:table-cell table:style-name="ce373" table:formula="of:=IF([.A126]=0;0;(PMT([.$C$3];[.$C$4];-[.$C$2])))" office:value-type="float" office:value="0" calcext:value-type="float">
            <text:p>0.00</text:p>
          </table:table-cell>
          <table:table-cell table:style-name="ce373" table:formula="of:=IF([.A126]=0;0;([.$C$2]-[.F126]))" office:value-type="float" office:value="0" calcext:value-type="float">
            <text:p>0.00</text:p>
          </table:table-cell>
          <table:table-cell table:style-name="ce373" table:formula="of:=IF([.A126]=0;0;([.B126]+[.F12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6]&gt;=[.$C$4];0;IF([.A126]=0;0;(1+[.A126])))" office:value-type="float" office:value="0" calcext:value-type="float">
            <text:p>0</text:p>
          </table:table-cell>
          <table:table-cell table:style-name="ce373" table:formula="of:=IF([.A127]=0;0;(PPMT([.$C$3];[.A127];[.$C$4];-[.$C$2])))" office:value-type="float" office:value="0" calcext:value-type="float">
            <text:p>0.00</text:p>
          </table:table-cell>
          <table:table-cell table:style-name="ce373" table:formula="of:=IF([.A127]=0;0;(IPMT([.$C$3];[.A127];[.$C$4];-[.$C$2])))" office:value-type="float" office:value="0" calcext:value-type="float">
            <text:p>0.00</text:p>
          </table:table-cell>
          <table:table-cell table:style-name="ce373" table:formula="of:=IF([.A127]=0;0;(PMT([.$C$3];[.$C$4];-[.$C$2])))" office:value-type="float" office:value="0" calcext:value-type="float">
            <text:p>0.00</text:p>
          </table:table-cell>
          <table:table-cell table:style-name="ce373" table:formula="of:=IF([.A127]=0;0;([.$C$2]-[.F127]))" office:value-type="float" office:value="0" calcext:value-type="float">
            <text:p>0.00</text:p>
          </table:table-cell>
          <table:table-cell table:style-name="ce373" table:formula="of:=IF([.A127]=0;0;([.B127]+[.F12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7]&gt;=[.$C$4];0;IF([.A127]=0;0;(1+[.A127])))" office:value-type="float" office:value="0" calcext:value-type="float">
            <text:p>0</text:p>
          </table:table-cell>
          <table:table-cell table:style-name="ce373" table:formula="of:=IF([.A128]=0;0;(PPMT([.$C$3];[.A128];[.$C$4];-[.$C$2])))" office:value-type="float" office:value="0" calcext:value-type="float">
            <text:p>0.00</text:p>
          </table:table-cell>
          <table:table-cell table:style-name="ce373" table:formula="of:=IF([.A128]=0;0;(IPMT([.$C$3];[.A128];[.$C$4];-[.$C$2])))" office:value-type="float" office:value="0" calcext:value-type="float">
            <text:p>0.00</text:p>
          </table:table-cell>
          <table:table-cell table:style-name="ce373" table:formula="of:=IF([.A128]=0;0;(PMT([.$C$3];[.$C$4];-[.$C$2])))" office:value-type="float" office:value="0" calcext:value-type="float">
            <text:p>0.00</text:p>
          </table:table-cell>
          <table:table-cell table:style-name="ce373" table:formula="of:=IF([.A128]=0;0;([.$C$2]-[.F128]))" office:value-type="float" office:value="0" calcext:value-type="float">
            <text:p>0.00</text:p>
          </table:table-cell>
          <table:table-cell table:style-name="ce373" table:formula="of:=IF([.A128]=0;0;([.B128]+[.F12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8]&gt;=[.$C$4];0;IF([.A128]=0;0;(1+[.A128])))" office:value-type="float" office:value="0" calcext:value-type="float">
            <text:p>0</text:p>
          </table:table-cell>
          <table:table-cell table:style-name="ce373" table:formula="of:=IF([.A129]=0;0;(PPMT([.$C$3];[.A129];[.$C$4];-[.$C$2])))" office:value-type="float" office:value="0" calcext:value-type="float">
            <text:p>0.00</text:p>
          </table:table-cell>
          <table:table-cell table:style-name="ce373" table:formula="of:=IF([.A129]=0;0;(IPMT([.$C$3];[.A129];[.$C$4];-[.$C$2])))" office:value-type="float" office:value="0" calcext:value-type="float">
            <text:p>0.00</text:p>
          </table:table-cell>
          <table:table-cell table:style-name="ce373" table:formula="of:=IF([.A129]=0;0;(PMT([.$C$3];[.$C$4];-[.$C$2])))" office:value-type="float" office:value="0" calcext:value-type="float">
            <text:p>0.00</text:p>
          </table:table-cell>
          <table:table-cell table:style-name="ce373" table:formula="of:=IF([.A129]=0;0;([.$C$2]-[.F129]))" office:value-type="float" office:value="0" calcext:value-type="float">
            <text:p>0.00</text:p>
          </table:table-cell>
          <table:table-cell table:style-name="ce373" table:formula="of:=IF([.A129]=0;0;([.B129]+[.F12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29]&gt;=[.$C$4];0;IF([.A129]=0;0;(1+[.A129])))" office:value-type="float" office:value="0" calcext:value-type="float">
            <text:p>0</text:p>
          </table:table-cell>
          <table:table-cell table:style-name="ce373" table:formula="of:=IF([.A130]=0;0;(PPMT([.$C$3];[.A130];[.$C$4];-[.$C$2])))" office:value-type="float" office:value="0" calcext:value-type="float">
            <text:p>0.00</text:p>
          </table:table-cell>
          <table:table-cell table:style-name="ce373" table:formula="of:=IF([.A130]=0;0;(IPMT([.$C$3];[.A130];[.$C$4];-[.$C$2])))" office:value-type="float" office:value="0" calcext:value-type="float">
            <text:p>0.00</text:p>
          </table:table-cell>
          <table:table-cell table:style-name="ce373" table:formula="of:=IF([.A130]=0;0;(PMT([.$C$3];[.$C$4];-[.$C$2])))" office:value-type="float" office:value="0" calcext:value-type="float">
            <text:p>0.00</text:p>
          </table:table-cell>
          <table:table-cell table:style-name="ce373" table:formula="of:=IF([.A130]=0;0;([.$C$2]-[.F130]))" office:value-type="float" office:value="0" calcext:value-type="float">
            <text:p>0.00</text:p>
          </table:table-cell>
          <table:table-cell table:style-name="ce373" table:formula="of:=IF([.A130]=0;0;([.B130]+[.F12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0]&gt;=[.$C$4];0;IF([.A130]=0;0;(1+[.A130])))" office:value-type="float" office:value="0" calcext:value-type="float">
            <text:p>0</text:p>
          </table:table-cell>
          <table:table-cell table:style-name="ce373" table:formula="of:=IF([.A131]=0;0;(PPMT([.$C$3];[.A131];[.$C$4];-[.$C$2])))" office:value-type="float" office:value="0" calcext:value-type="float">
            <text:p>0.00</text:p>
          </table:table-cell>
          <table:table-cell table:style-name="ce373" table:formula="of:=IF([.A131]=0;0;(IPMT([.$C$3];[.A131];[.$C$4];-[.$C$2])))" office:value-type="float" office:value="0" calcext:value-type="float">
            <text:p>0.00</text:p>
          </table:table-cell>
          <table:table-cell table:style-name="ce373" table:formula="of:=IF([.A131]=0;0;(PMT([.$C$3];[.$C$4];-[.$C$2])))" office:value-type="float" office:value="0" calcext:value-type="float">
            <text:p>0.00</text:p>
          </table:table-cell>
          <table:table-cell table:style-name="ce373" table:formula="of:=IF([.A131]=0;0;([.$C$2]-[.F131]))" office:value-type="float" office:value="0" calcext:value-type="float">
            <text:p>0.00</text:p>
          </table:table-cell>
          <table:table-cell table:style-name="ce373" table:formula="of:=IF([.A131]=0;0;([.B131]+[.F13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1]&gt;=[.$C$4];0;IF([.A131]=0;0;(1+[.A131])))" office:value-type="float" office:value="0" calcext:value-type="float">
            <text:p>0</text:p>
          </table:table-cell>
          <table:table-cell table:style-name="ce373" table:formula="of:=IF([.A132]=0;0;(PPMT([.$C$3];[.A132];[.$C$4];-[.$C$2])))" office:value-type="float" office:value="0" calcext:value-type="float">
            <text:p>0.00</text:p>
          </table:table-cell>
          <table:table-cell table:style-name="ce373" table:formula="of:=IF([.A132]=0;0;(IPMT([.$C$3];[.A132];[.$C$4];-[.$C$2])))" office:value-type="float" office:value="0" calcext:value-type="float">
            <text:p>0.00</text:p>
          </table:table-cell>
          <table:table-cell table:style-name="ce373" table:formula="of:=IF([.A132]=0;0;(PMT([.$C$3];[.$C$4];-[.$C$2])))" office:value-type="float" office:value="0" calcext:value-type="float">
            <text:p>0.00</text:p>
          </table:table-cell>
          <table:table-cell table:style-name="ce373" table:formula="of:=IF([.A132]=0;0;([.$C$2]-[.F132]))" office:value-type="float" office:value="0" calcext:value-type="float">
            <text:p>0.00</text:p>
          </table:table-cell>
          <table:table-cell table:style-name="ce373" table:formula="of:=IF([.A132]=0;0;([.B132]+[.F13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2]&gt;=[.$C$4];0;IF([.A132]=0;0;(1+[.A132])))" office:value-type="float" office:value="0" calcext:value-type="float">
            <text:p>0</text:p>
          </table:table-cell>
          <table:table-cell table:style-name="ce373" table:formula="of:=IF([.A133]=0;0;(PPMT([.$C$3];[.A133];[.$C$4];-[.$C$2])))" office:value-type="float" office:value="0" calcext:value-type="float">
            <text:p>0.00</text:p>
          </table:table-cell>
          <table:table-cell table:style-name="ce373" table:formula="of:=IF([.A133]=0;0;(IPMT([.$C$3];[.A133];[.$C$4];-[.$C$2])))" office:value-type="float" office:value="0" calcext:value-type="float">
            <text:p>0.00</text:p>
          </table:table-cell>
          <table:table-cell table:style-name="ce373" table:formula="of:=IF([.A133]=0;0;(PMT([.$C$3];[.$C$4];-[.$C$2])))" office:value-type="float" office:value="0" calcext:value-type="float">
            <text:p>0.00</text:p>
          </table:table-cell>
          <table:table-cell table:style-name="ce373" table:formula="of:=IF([.A133]=0;0;([.$C$2]-[.F133]))" office:value-type="float" office:value="0" calcext:value-type="float">
            <text:p>0.00</text:p>
          </table:table-cell>
          <table:table-cell table:style-name="ce373" table:formula="of:=IF([.A133]=0;0;([.B133]+[.F13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3]&gt;=[.$C$4];0;IF([.A133]=0;0;(1+[.A133])))" office:value-type="float" office:value="0" calcext:value-type="float">
            <text:p>0</text:p>
          </table:table-cell>
          <table:table-cell table:style-name="ce373" table:formula="of:=IF([.A134]=0;0;(PPMT([.$C$3];[.A134];[.$C$4];-[.$C$2])))" office:value-type="float" office:value="0" calcext:value-type="float">
            <text:p>0.00</text:p>
          </table:table-cell>
          <table:table-cell table:style-name="ce373" table:formula="of:=IF([.A134]=0;0;(IPMT([.$C$3];[.A134];[.$C$4];-[.$C$2])))" office:value-type="float" office:value="0" calcext:value-type="float">
            <text:p>0.00</text:p>
          </table:table-cell>
          <table:table-cell table:style-name="ce373" table:formula="of:=IF([.A134]=0;0;(PMT([.$C$3];[.$C$4];-[.$C$2])))" office:value-type="float" office:value="0" calcext:value-type="float">
            <text:p>0.00</text:p>
          </table:table-cell>
          <table:table-cell table:style-name="ce373" table:formula="of:=IF([.A134]=0;0;([.$C$2]-[.F134]))" office:value-type="float" office:value="0" calcext:value-type="float">
            <text:p>0.00</text:p>
          </table:table-cell>
          <table:table-cell table:style-name="ce373" table:formula="of:=IF([.A134]=0;0;([.B134]+[.F13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4]&gt;=[.$C$4];0;IF([.A134]=0;0;(1+[.A134])))" office:value-type="float" office:value="0" calcext:value-type="float">
            <text:p>0</text:p>
          </table:table-cell>
          <table:table-cell table:style-name="ce373" table:formula="of:=IF([.A135]=0;0;(PPMT([.$C$3];[.A135];[.$C$4];-[.$C$2])))" office:value-type="float" office:value="0" calcext:value-type="float">
            <text:p>0.00</text:p>
          </table:table-cell>
          <table:table-cell table:style-name="ce373" table:formula="of:=IF([.A135]=0;0;(IPMT([.$C$3];[.A135];[.$C$4];-[.$C$2])))" office:value-type="float" office:value="0" calcext:value-type="float">
            <text:p>0.00</text:p>
          </table:table-cell>
          <table:table-cell table:style-name="ce373" table:formula="of:=IF([.A135]=0;0;(PMT([.$C$3];[.$C$4];-[.$C$2])))" office:value-type="float" office:value="0" calcext:value-type="float">
            <text:p>0.00</text:p>
          </table:table-cell>
          <table:table-cell table:style-name="ce373" table:formula="of:=IF([.A135]=0;0;([.$C$2]-[.F135]))" office:value-type="float" office:value="0" calcext:value-type="float">
            <text:p>0.00</text:p>
          </table:table-cell>
          <table:table-cell table:style-name="ce373" table:formula="of:=IF([.A135]=0;0;([.B135]+[.F13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5]&gt;=[.$C$4];0;IF([.A135]=0;0;(1+[.A135])))" office:value-type="float" office:value="0" calcext:value-type="float">
            <text:p>0</text:p>
          </table:table-cell>
          <table:table-cell table:style-name="ce373" table:formula="of:=IF([.A136]=0;0;(PPMT([.$C$3];[.A136];[.$C$4];-[.$C$2])))" office:value-type="float" office:value="0" calcext:value-type="float">
            <text:p>0.00</text:p>
          </table:table-cell>
          <table:table-cell table:style-name="ce373" table:formula="of:=IF([.A136]=0;0;(IPMT([.$C$3];[.A136];[.$C$4];-[.$C$2])))" office:value-type="float" office:value="0" calcext:value-type="float">
            <text:p>0.00</text:p>
          </table:table-cell>
          <table:table-cell table:style-name="ce373" table:formula="of:=IF([.A136]=0;0;(PMT([.$C$3];[.$C$4];-[.$C$2])))" office:value-type="float" office:value="0" calcext:value-type="float">
            <text:p>0.00</text:p>
          </table:table-cell>
          <table:table-cell table:style-name="ce373" table:formula="of:=IF([.A136]=0;0;([.$C$2]-[.F136]))" office:value-type="float" office:value="0" calcext:value-type="float">
            <text:p>0.00</text:p>
          </table:table-cell>
          <table:table-cell table:style-name="ce373" table:formula="of:=IF([.A136]=0;0;([.B136]+[.F13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6]&gt;=[.$C$4];0;IF([.A136]=0;0;(1+[.A136])))" office:value-type="float" office:value="0" calcext:value-type="float">
            <text:p>0</text:p>
          </table:table-cell>
          <table:table-cell table:style-name="ce373" table:formula="of:=IF([.A137]=0;0;(PPMT([.$C$3];[.A137];[.$C$4];-[.$C$2])))" office:value-type="float" office:value="0" calcext:value-type="float">
            <text:p>0.00</text:p>
          </table:table-cell>
          <table:table-cell table:style-name="ce373" table:formula="of:=IF([.A137]=0;0;(IPMT([.$C$3];[.A137];[.$C$4];-[.$C$2])))" office:value-type="float" office:value="0" calcext:value-type="float">
            <text:p>0.00</text:p>
          </table:table-cell>
          <table:table-cell table:style-name="ce373" table:formula="of:=IF([.A137]=0;0;(PMT([.$C$3];[.$C$4];-[.$C$2])))" office:value-type="float" office:value="0" calcext:value-type="float">
            <text:p>0.00</text:p>
          </table:table-cell>
          <table:table-cell table:style-name="ce373" table:formula="of:=IF([.A137]=0;0;([.$C$2]-[.F137]))" office:value-type="float" office:value="0" calcext:value-type="float">
            <text:p>0.00</text:p>
          </table:table-cell>
          <table:table-cell table:style-name="ce373" table:formula="of:=IF([.A137]=0;0;([.B137]+[.F13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7]&gt;=[.$C$4];0;IF([.A137]=0;0;(1+[.A137])))" office:value-type="float" office:value="0" calcext:value-type="float">
            <text:p>0</text:p>
          </table:table-cell>
          <table:table-cell table:style-name="ce373" table:formula="of:=IF([.A138]=0;0;(PPMT([.$C$3];[.A138];[.$C$4];-[.$C$2])))" office:value-type="float" office:value="0" calcext:value-type="float">
            <text:p>0.00</text:p>
          </table:table-cell>
          <table:table-cell table:style-name="ce373" table:formula="of:=IF([.A138]=0;0;(IPMT([.$C$3];[.A138];[.$C$4];-[.$C$2])))" office:value-type="float" office:value="0" calcext:value-type="float">
            <text:p>0.00</text:p>
          </table:table-cell>
          <table:table-cell table:style-name="ce373" table:formula="of:=IF([.A138]=0;0;(PMT([.$C$3];[.$C$4];-[.$C$2])))" office:value-type="float" office:value="0" calcext:value-type="float">
            <text:p>0.00</text:p>
          </table:table-cell>
          <table:table-cell table:style-name="ce373" table:formula="of:=IF([.A138]=0;0;([.$C$2]-[.F138]))" office:value-type="float" office:value="0" calcext:value-type="float">
            <text:p>0.00</text:p>
          </table:table-cell>
          <table:table-cell table:style-name="ce373" table:formula="of:=IF([.A138]=0;0;([.B138]+[.F13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8]&gt;=[.$C$4];0;IF([.A138]=0;0;(1+[.A138])))" office:value-type="float" office:value="0" calcext:value-type="float">
            <text:p>0</text:p>
          </table:table-cell>
          <table:table-cell table:style-name="ce373" table:formula="of:=IF([.A139]=0;0;(PPMT([.$C$3];[.A139];[.$C$4];-[.$C$2])))" office:value-type="float" office:value="0" calcext:value-type="float">
            <text:p>0.00</text:p>
          </table:table-cell>
          <table:table-cell table:style-name="ce373" table:formula="of:=IF([.A139]=0;0;(IPMT([.$C$3];[.A139];[.$C$4];-[.$C$2])))" office:value-type="float" office:value="0" calcext:value-type="float">
            <text:p>0.00</text:p>
          </table:table-cell>
          <table:table-cell table:style-name="ce373" table:formula="of:=IF([.A139]=0;0;(PMT([.$C$3];[.$C$4];-[.$C$2])))" office:value-type="float" office:value="0" calcext:value-type="float">
            <text:p>0.00</text:p>
          </table:table-cell>
          <table:table-cell table:style-name="ce373" table:formula="of:=IF([.A139]=0;0;([.$C$2]-[.F139]))" office:value-type="float" office:value="0" calcext:value-type="float">
            <text:p>0.00</text:p>
          </table:table-cell>
          <table:table-cell table:style-name="ce373" table:formula="of:=IF([.A139]=0;0;([.B139]+[.F13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39]&gt;=[.$C$4];0;IF([.A139]=0;0;(1+[.A139])))" office:value-type="float" office:value="0" calcext:value-type="float">
            <text:p>0</text:p>
          </table:table-cell>
          <table:table-cell table:style-name="ce373" table:formula="of:=IF([.A140]=0;0;(PPMT([.$C$3];[.A140];[.$C$4];-[.$C$2])))" office:value-type="float" office:value="0" calcext:value-type="float">
            <text:p>0.00</text:p>
          </table:table-cell>
          <table:table-cell table:style-name="ce373" table:formula="of:=IF([.A140]=0;0;(IPMT([.$C$3];[.A140];[.$C$4];-[.$C$2])))" office:value-type="float" office:value="0" calcext:value-type="float">
            <text:p>0.00</text:p>
          </table:table-cell>
          <table:table-cell table:style-name="ce373" table:formula="of:=IF([.A140]=0;0;(PMT([.$C$3];[.$C$4];-[.$C$2])))" office:value-type="float" office:value="0" calcext:value-type="float">
            <text:p>0.00</text:p>
          </table:table-cell>
          <table:table-cell table:style-name="ce373" table:formula="of:=IF([.A140]=0;0;([.$C$2]-[.F140]))" office:value-type="float" office:value="0" calcext:value-type="float">
            <text:p>0.00</text:p>
          </table:table-cell>
          <table:table-cell table:style-name="ce373" table:formula="of:=IF([.A140]=0;0;([.B140]+[.F13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0]&gt;=[.$C$4];0;IF([.A140]=0;0;(1+[.A140])))" office:value-type="float" office:value="0" calcext:value-type="float">
            <text:p>0</text:p>
          </table:table-cell>
          <table:table-cell table:style-name="ce373" table:formula="of:=IF([.A141]=0;0;(PPMT([.$C$3];[.A141];[.$C$4];-[.$C$2])))" office:value-type="float" office:value="0" calcext:value-type="float">
            <text:p>0.00</text:p>
          </table:table-cell>
          <table:table-cell table:style-name="ce373" table:formula="of:=IF([.A141]=0;0;(IPMT([.$C$3];[.A141];[.$C$4];-[.$C$2])))" office:value-type="float" office:value="0" calcext:value-type="float">
            <text:p>0.00</text:p>
          </table:table-cell>
          <table:table-cell table:style-name="ce373" table:formula="of:=IF([.A141]=0;0;(PMT([.$C$3];[.$C$4];-[.$C$2])))" office:value-type="float" office:value="0" calcext:value-type="float">
            <text:p>0.00</text:p>
          </table:table-cell>
          <table:table-cell table:style-name="ce373" table:formula="of:=IF([.A141]=0;0;([.$C$2]-[.F141]))" office:value-type="float" office:value="0" calcext:value-type="float">
            <text:p>0.00</text:p>
          </table:table-cell>
          <table:table-cell table:style-name="ce373" table:formula="of:=IF([.A141]=0;0;([.B141]+[.F14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1]&gt;=[.$C$4];0;IF([.A141]=0;0;(1+[.A141])))" office:value-type="float" office:value="0" calcext:value-type="float">
            <text:p>0</text:p>
          </table:table-cell>
          <table:table-cell table:style-name="ce373" table:formula="of:=IF([.A142]=0;0;(PPMT([.$C$3];[.A142];[.$C$4];-[.$C$2])))" office:value-type="float" office:value="0" calcext:value-type="float">
            <text:p>0.00</text:p>
          </table:table-cell>
          <table:table-cell table:style-name="ce373" table:formula="of:=IF([.A142]=0;0;(IPMT([.$C$3];[.A142];[.$C$4];-[.$C$2])))" office:value-type="float" office:value="0" calcext:value-type="float">
            <text:p>0.00</text:p>
          </table:table-cell>
          <table:table-cell table:style-name="ce373" table:formula="of:=IF([.A142]=0;0;(PMT([.$C$3];[.$C$4];-[.$C$2])))" office:value-type="float" office:value="0" calcext:value-type="float">
            <text:p>0.00</text:p>
          </table:table-cell>
          <table:table-cell table:style-name="ce373" table:formula="of:=IF([.A142]=0;0;([.$C$2]-[.F142]))" office:value-type="float" office:value="0" calcext:value-type="float">
            <text:p>0.00</text:p>
          </table:table-cell>
          <table:table-cell table:style-name="ce373" table:formula="of:=IF([.A142]=0;0;([.B142]+[.F14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2]&gt;=[.$C$4];0;IF([.A142]=0;0;(1+[.A142])))" office:value-type="float" office:value="0" calcext:value-type="float">
            <text:p>0</text:p>
          </table:table-cell>
          <table:table-cell table:style-name="ce373" table:formula="of:=IF([.A143]=0;0;(PPMT([.$C$3];[.A143];[.$C$4];-[.$C$2])))" office:value-type="float" office:value="0" calcext:value-type="float">
            <text:p>0.00</text:p>
          </table:table-cell>
          <table:table-cell table:style-name="ce373" table:formula="of:=IF([.A143]=0;0;(IPMT([.$C$3];[.A143];[.$C$4];-[.$C$2])))" office:value-type="float" office:value="0" calcext:value-type="float">
            <text:p>0.00</text:p>
          </table:table-cell>
          <table:table-cell table:style-name="ce373" table:formula="of:=IF([.A143]=0;0;(PMT([.$C$3];[.$C$4];-[.$C$2])))" office:value-type="float" office:value="0" calcext:value-type="float">
            <text:p>0.00</text:p>
          </table:table-cell>
          <table:table-cell table:style-name="ce373" table:formula="of:=IF([.A143]=0;0;([.$C$2]-[.F143]))" office:value-type="float" office:value="0" calcext:value-type="float">
            <text:p>0.00</text:p>
          </table:table-cell>
          <table:table-cell table:style-name="ce373" table:formula="of:=IF([.A143]=0;0;([.B143]+[.F14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3]&gt;=[.$C$4];0;IF([.A143]=0;0;(1+[.A143])))" office:value-type="float" office:value="0" calcext:value-type="float">
            <text:p>0</text:p>
          </table:table-cell>
          <table:table-cell table:style-name="ce373" table:formula="of:=IF([.A144]=0;0;(PPMT([.$C$3];[.A144];[.$C$4];-[.$C$2])))" office:value-type="float" office:value="0" calcext:value-type="float">
            <text:p>0.00</text:p>
          </table:table-cell>
          <table:table-cell table:style-name="ce373" table:formula="of:=IF([.A144]=0;0;(IPMT([.$C$3];[.A144];[.$C$4];-[.$C$2])))" office:value-type="float" office:value="0" calcext:value-type="float">
            <text:p>0.00</text:p>
          </table:table-cell>
          <table:table-cell table:style-name="ce373" table:formula="of:=IF([.A144]=0;0;(PMT([.$C$3];[.$C$4];-[.$C$2])))" office:value-type="float" office:value="0" calcext:value-type="float">
            <text:p>0.00</text:p>
          </table:table-cell>
          <table:table-cell table:style-name="ce373" table:formula="of:=IF([.A144]=0;0;([.$C$2]-[.F144]))" office:value-type="float" office:value="0" calcext:value-type="float">
            <text:p>0.00</text:p>
          </table:table-cell>
          <table:table-cell table:style-name="ce373" table:formula="of:=IF([.A144]=0;0;([.B144]+[.F14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4]&gt;=[.$C$4];0;IF([.A144]=0;0;(1+[.A144])))" office:value-type="float" office:value="0" calcext:value-type="float">
            <text:p>0</text:p>
          </table:table-cell>
          <table:table-cell table:style-name="ce373" table:formula="of:=IF([.A145]=0;0;(PPMT([.$C$3];[.A145];[.$C$4];-[.$C$2])))" office:value-type="float" office:value="0" calcext:value-type="float">
            <text:p>0.00</text:p>
          </table:table-cell>
          <table:table-cell table:style-name="ce373" table:formula="of:=IF([.A145]=0;0;(IPMT([.$C$3];[.A145];[.$C$4];-[.$C$2])))" office:value-type="float" office:value="0" calcext:value-type="float">
            <text:p>0.00</text:p>
          </table:table-cell>
          <table:table-cell table:style-name="ce373" table:formula="of:=IF([.A145]=0;0;(PMT([.$C$3];[.$C$4];-[.$C$2])))" office:value-type="float" office:value="0" calcext:value-type="float">
            <text:p>0.00</text:p>
          </table:table-cell>
          <table:table-cell table:style-name="ce373" table:formula="of:=IF([.A145]=0;0;([.$C$2]-[.F145]))" office:value-type="float" office:value="0" calcext:value-type="float">
            <text:p>0.00</text:p>
          </table:table-cell>
          <table:table-cell table:style-name="ce373" table:formula="of:=IF([.A145]=0;0;([.B145]+[.F14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5]&gt;=[.$C$4];0;IF([.A145]=0;0;(1+[.A145])))" office:value-type="float" office:value="0" calcext:value-type="float">
            <text:p>0</text:p>
          </table:table-cell>
          <table:table-cell table:style-name="ce373" table:formula="of:=IF([.A146]=0;0;(PPMT([.$C$3];[.A146];[.$C$4];-[.$C$2])))" office:value-type="float" office:value="0" calcext:value-type="float">
            <text:p>0.00</text:p>
          </table:table-cell>
          <table:table-cell table:style-name="ce373" table:formula="of:=IF([.A146]=0;0;(IPMT([.$C$3];[.A146];[.$C$4];-[.$C$2])))" office:value-type="float" office:value="0" calcext:value-type="float">
            <text:p>0.00</text:p>
          </table:table-cell>
          <table:table-cell table:style-name="ce373" table:formula="of:=IF([.A146]=0;0;(PMT([.$C$3];[.$C$4];-[.$C$2])))" office:value-type="float" office:value="0" calcext:value-type="float">
            <text:p>0.00</text:p>
          </table:table-cell>
          <table:table-cell table:style-name="ce373" table:formula="of:=IF([.A146]=0;0;([.$C$2]-[.F146]))" office:value-type="float" office:value="0" calcext:value-type="float">
            <text:p>0.00</text:p>
          </table:table-cell>
          <table:table-cell table:style-name="ce373" table:formula="of:=IF([.A146]=0;0;([.B146]+[.F14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6]&gt;=[.$C$4];0;IF([.A146]=0;0;(1+[.A146])))" office:value-type="float" office:value="0" calcext:value-type="float">
            <text:p>0</text:p>
          </table:table-cell>
          <table:table-cell table:style-name="ce373" table:formula="of:=IF([.A147]=0;0;(PPMT([.$C$3];[.A147];[.$C$4];-[.$C$2])))" office:value-type="float" office:value="0" calcext:value-type="float">
            <text:p>0.00</text:p>
          </table:table-cell>
          <table:table-cell table:style-name="ce373" table:formula="of:=IF([.A147]=0;0;(IPMT([.$C$3];[.A147];[.$C$4];-[.$C$2])))" office:value-type="float" office:value="0" calcext:value-type="float">
            <text:p>0.00</text:p>
          </table:table-cell>
          <table:table-cell table:style-name="ce373" table:formula="of:=IF([.A147]=0;0;(PMT([.$C$3];[.$C$4];-[.$C$2])))" office:value-type="float" office:value="0" calcext:value-type="float">
            <text:p>0.00</text:p>
          </table:table-cell>
          <table:table-cell table:style-name="ce373" table:formula="of:=IF([.A147]=0;0;([.$C$2]-[.F147]))" office:value-type="float" office:value="0" calcext:value-type="float">
            <text:p>0.00</text:p>
          </table:table-cell>
          <table:table-cell table:style-name="ce373" table:formula="of:=IF([.A147]=0;0;([.B147]+[.F14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7]&gt;=[.$C$4];0;IF([.A147]=0;0;(1+[.A147])))" office:value-type="float" office:value="0" calcext:value-type="float">
            <text:p>0</text:p>
          </table:table-cell>
          <table:table-cell table:style-name="ce373" table:formula="of:=IF([.A148]=0;0;(PPMT([.$C$3];[.A148];[.$C$4];-[.$C$2])))" office:value-type="float" office:value="0" calcext:value-type="float">
            <text:p>0.00</text:p>
          </table:table-cell>
          <table:table-cell table:style-name="ce373" table:formula="of:=IF([.A148]=0;0;(IPMT([.$C$3];[.A148];[.$C$4];-[.$C$2])))" office:value-type="float" office:value="0" calcext:value-type="float">
            <text:p>0.00</text:p>
          </table:table-cell>
          <table:table-cell table:style-name="ce373" table:formula="of:=IF([.A148]=0;0;(PMT([.$C$3];[.$C$4];-[.$C$2])))" office:value-type="float" office:value="0" calcext:value-type="float">
            <text:p>0.00</text:p>
          </table:table-cell>
          <table:table-cell table:style-name="ce373" table:formula="of:=IF([.A148]=0;0;([.$C$2]-[.F148]))" office:value-type="float" office:value="0" calcext:value-type="float">
            <text:p>0.00</text:p>
          </table:table-cell>
          <table:table-cell table:style-name="ce373" table:formula="of:=IF([.A148]=0;0;([.B148]+[.F14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8]&gt;=[.$C$4];0;IF([.A148]=0;0;(1+[.A148])))" office:value-type="float" office:value="0" calcext:value-type="float">
            <text:p>0</text:p>
          </table:table-cell>
          <table:table-cell table:style-name="ce373" table:formula="of:=IF([.A149]=0;0;(PPMT([.$C$3];[.A149];[.$C$4];-[.$C$2])))" office:value-type="float" office:value="0" calcext:value-type="float">
            <text:p>0.00</text:p>
          </table:table-cell>
          <table:table-cell table:style-name="ce373" table:formula="of:=IF([.A149]=0;0;(IPMT([.$C$3];[.A149];[.$C$4];-[.$C$2])))" office:value-type="float" office:value="0" calcext:value-type="float">
            <text:p>0.00</text:p>
          </table:table-cell>
          <table:table-cell table:style-name="ce373" table:formula="of:=IF([.A149]=0;0;(PMT([.$C$3];[.$C$4];-[.$C$2])))" office:value-type="float" office:value="0" calcext:value-type="float">
            <text:p>0.00</text:p>
          </table:table-cell>
          <table:table-cell table:style-name="ce373" table:formula="of:=IF([.A149]=0;0;([.$C$2]-[.F149]))" office:value-type="float" office:value="0" calcext:value-type="float">
            <text:p>0.00</text:p>
          </table:table-cell>
          <table:table-cell table:style-name="ce373" table:formula="of:=IF([.A149]=0;0;([.B149]+[.F14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49]&gt;=[.$C$4];0;IF([.A149]=0;0;(1+[.A149])))" office:value-type="float" office:value="0" calcext:value-type="float">
            <text:p>0</text:p>
          </table:table-cell>
          <table:table-cell table:style-name="ce373" table:formula="of:=IF([.A150]=0;0;(PPMT([.$C$3];[.A150];[.$C$4];-[.$C$2])))" office:value-type="float" office:value="0" calcext:value-type="float">
            <text:p>0.00</text:p>
          </table:table-cell>
          <table:table-cell table:style-name="ce373" table:formula="of:=IF([.A150]=0;0;(IPMT([.$C$3];[.A150];[.$C$4];-[.$C$2])))" office:value-type="float" office:value="0" calcext:value-type="float">
            <text:p>0.00</text:p>
          </table:table-cell>
          <table:table-cell table:style-name="ce373" table:formula="of:=IF([.A150]=0;0;(PMT([.$C$3];[.$C$4];-[.$C$2])))" office:value-type="float" office:value="0" calcext:value-type="float">
            <text:p>0.00</text:p>
          </table:table-cell>
          <table:table-cell table:style-name="ce373" table:formula="of:=IF([.A150]=0;0;([.$C$2]-[.F150]))" office:value-type="float" office:value="0" calcext:value-type="float">
            <text:p>0.00</text:p>
          </table:table-cell>
          <table:table-cell table:style-name="ce373" table:formula="of:=IF([.A150]=0;0;([.B150]+[.F14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0]&gt;=[.$C$4];0;IF([.A150]=0;0;(1+[.A150])))" office:value-type="float" office:value="0" calcext:value-type="float">
            <text:p>0</text:p>
          </table:table-cell>
          <table:table-cell table:style-name="ce373" table:formula="of:=IF([.A151]=0;0;(PPMT([.$C$3];[.A151];[.$C$4];-[.$C$2])))" office:value-type="float" office:value="0" calcext:value-type="float">
            <text:p>0.00</text:p>
          </table:table-cell>
          <table:table-cell table:style-name="ce373" table:formula="of:=IF([.A151]=0;0;(IPMT([.$C$3];[.A151];[.$C$4];-[.$C$2])))" office:value-type="float" office:value="0" calcext:value-type="float">
            <text:p>0.00</text:p>
          </table:table-cell>
          <table:table-cell table:style-name="ce373" table:formula="of:=IF([.A151]=0;0;(PMT([.$C$3];[.$C$4];-[.$C$2])))" office:value-type="float" office:value="0" calcext:value-type="float">
            <text:p>0.00</text:p>
          </table:table-cell>
          <table:table-cell table:style-name="ce373" table:formula="of:=IF([.A151]=0;0;([.$C$2]-[.F151]))" office:value-type="float" office:value="0" calcext:value-type="float">
            <text:p>0.00</text:p>
          </table:table-cell>
          <table:table-cell table:style-name="ce373" table:formula="of:=IF([.A151]=0;0;([.B151]+[.F15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1]&gt;=[.$C$4];0;IF([.A151]=0;0;(1+[.A151])))" office:value-type="float" office:value="0" calcext:value-type="float">
            <text:p>0</text:p>
          </table:table-cell>
          <table:table-cell table:style-name="ce373" table:formula="of:=IF([.A152]=0;0;(PPMT([.$C$3];[.A152];[.$C$4];-[.$C$2])))" office:value-type="float" office:value="0" calcext:value-type="float">
            <text:p>0.00</text:p>
          </table:table-cell>
          <table:table-cell table:style-name="ce373" table:formula="of:=IF([.A152]=0;0;(IPMT([.$C$3];[.A152];[.$C$4];-[.$C$2])))" office:value-type="float" office:value="0" calcext:value-type="float">
            <text:p>0.00</text:p>
          </table:table-cell>
          <table:table-cell table:style-name="ce373" table:formula="of:=IF([.A152]=0;0;(PMT([.$C$3];[.$C$4];-[.$C$2])))" office:value-type="float" office:value="0" calcext:value-type="float">
            <text:p>0.00</text:p>
          </table:table-cell>
          <table:table-cell table:style-name="ce373" table:formula="of:=IF([.A152]=0;0;([.$C$2]-[.F152]))" office:value-type="float" office:value="0" calcext:value-type="float">
            <text:p>0.00</text:p>
          </table:table-cell>
          <table:table-cell table:style-name="ce373" table:formula="of:=IF([.A152]=0;0;([.B152]+[.F15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2]&gt;=[.$C$4];0;IF([.A152]=0;0;(1+[.A152])))" office:value-type="float" office:value="0" calcext:value-type="float">
            <text:p>0</text:p>
          </table:table-cell>
          <table:table-cell table:style-name="ce373" table:formula="of:=IF([.A153]=0;0;(PPMT([.$C$3];[.A153];[.$C$4];-[.$C$2])))" office:value-type="float" office:value="0" calcext:value-type="float">
            <text:p>0.00</text:p>
          </table:table-cell>
          <table:table-cell table:style-name="ce373" table:formula="of:=IF([.A153]=0;0;(IPMT([.$C$3];[.A153];[.$C$4];-[.$C$2])))" office:value-type="float" office:value="0" calcext:value-type="float">
            <text:p>0.00</text:p>
          </table:table-cell>
          <table:table-cell table:style-name="ce373" table:formula="of:=IF([.A153]=0;0;(PMT([.$C$3];[.$C$4];-[.$C$2])))" office:value-type="float" office:value="0" calcext:value-type="float">
            <text:p>0.00</text:p>
          </table:table-cell>
          <table:table-cell table:style-name="ce373" table:formula="of:=IF([.A153]=0;0;([.$C$2]-[.F153]))" office:value-type="float" office:value="0" calcext:value-type="float">
            <text:p>0.00</text:p>
          </table:table-cell>
          <table:table-cell table:style-name="ce373" table:formula="of:=IF([.A153]=0;0;([.B153]+[.F15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3]&gt;=[.$C$4];0;IF([.A153]=0;0;(1+[.A153])))" office:value-type="float" office:value="0" calcext:value-type="float">
            <text:p>0</text:p>
          </table:table-cell>
          <table:table-cell table:style-name="ce373" table:formula="of:=IF([.A154]=0;0;(PPMT([.$C$3];[.A154];[.$C$4];-[.$C$2])))" office:value-type="float" office:value="0" calcext:value-type="float">
            <text:p>0.00</text:p>
          </table:table-cell>
          <table:table-cell table:style-name="ce373" table:formula="of:=IF([.A154]=0;0;(IPMT([.$C$3];[.A154];[.$C$4];-[.$C$2])))" office:value-type="float" office:value="0" calcext:value-type="float">
            <text:p>0.00</text:p>
          </table:table-cell>
          <table:table-cell table:style-name="ce373" table:formula="of:=IF([.A154]=0;0;(PMT([.$C$3];[.$C$4];-[.$C$2])))" office:value-type="float" office:value="0" calcext:value-type="float">
            <text:p>0.00</text:p>
          </table:table-cell>
          <table:table-cell table:style-name="ce373" table:formula="of:=IF([.A154]=0;0;([.$C$2]-[.F154]))" office:value-type="float" office:value="0" calcext:value-type="float">
            <text:p>0.00</text:p>
          </table:table-cell>
          <table:table-cell table:style-name="ce373" table:formula="of:=IF([.A154]=0;0;([.B154]+[.F15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4]&gt;=[.$C$4];0;IF([.A154]=0;0;(1+[.A154])))" office:value-type="float" office:value="0" calcext:value-type="float">
            <text:p>0</text:p>
          </table:table-cell>
          <table:table-cell table:style-name="ce373" table:formula="of:=IF([.A155]=0;0;(PPMT([.$C$3];[.A155];[.$C$4];-[.$C$2])))" office:value-type="float" office:value="0" calcext:value-type="float">
            <text:p>0.00</text:p>
          </table:table-cell>
          <table:table-cell table:style-name="ce373" table:formula="of:=IF([.A155]=0;0;(IPMT([.$C$3];[.A155];[.$C$4];-[.$C$2])))" office:value-type="float" office:value="0" calcext:value-type="float">
            <text:p>0.00</text:p>
          </table:table-cell>
          <table:table-cell table:style-name="ce373" table:formula="of:=IF([.A155]=0;0;(PMT([.$C$3];[.$C$4];-[.$C$2])))" office:value-type="float" office:value="0" calcext:value-type="float">
            <text:p>0.00</text:p>
          </table:table-cell>
          <table:table-cell table:style-name="ce373" table:formula="of:=IF([.A155]=0;0;([.$C$2]-[.F155]))" office:value-type="float" office:value="0" calcext:value-type="float">
            <text:p>0.00</text:p>
          </table:table-cell>
          <table:table-cell table:style-name="ce373" table:formula="of:=IF([.A155]=0;0;([.B155]+[.F15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5]&gt;=[.$C$4];0;IF([.A155]=0;0;(1+[.A155])))" office:value-type="float" office:value="0" calcext:value-type="float">
            <text:p>0</text:p>
          </table:table-cell>
          <table:table-cell table:style-name="ce373" table:formula="of:=IF([.A156]=0;0;(PPMT([.$C$3];[.A156];[.$C$4];-[.$C$2])))" office:value-type="float" office:value="0" calcext:value-type="float">
            <text:p>0.00</text:p>
          </table:table-cell>
          <table:table-cell table:style-name="ce373" table:formula="of:=IF([.A156]=0;0;(IPMT([.$C$3];[.A156];[.$C$4];-[.$C$2])))" office:value-type="float" office:value="0" calcext:value-type="float">
            <text:p>0.00</text:p>
          </table:table-cell>
          <table:table-cell table:style-name="ce373" table:formula="of:=IF([.A156]=0;0;(PMT([.$C$3];[.$C$4];-[.$C$2])))" office:value-type="float" office:value="0" calcext:value-type="float">
            <text:p>0.00</text:p>
          </table:table-cell>
          <table:table-cell table:style-name="ce373" table:formula="of:=IF([.A156]=0;0;([.$C$2]-[.F156]))" office:value-type="float" office:value="0" calcext:value-type="float">
            <text:p>0.00</text:p>
          </table:table-cell>
          <table:table-cell table:style-name="ce373" table:formula="of:=IF([.A156]=0;0;([.B156]+[.F15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6]&gt;=[.$C$4];0;IF([.A156]=0;0;(1+[.A156])))" office:value-type="float" office:value="0" calcext:value-type="float">
            <text:p>0</text:p>
          </table:table-cell>
          <table:table-cell table:style-name="ce373" table:formula="of:=IF([.A157]=0;0;(PPMT([.$C$3];[.A157];[.$C$4];-[.$C$2])))" office:value-type="float" office:value="0" calcext:value-type="float">
            <text:p>0.00</text:p>
          </table:table-cell>
          <table:table-cell table:style-name="ce373" table:formula="of:=IF([.A157]=0;0;(IPMT([.$C$3];[.A157];[.$C$4];-[.$C$2])))" office:value-type="float" office:value="0" calcext:value-type="float">
            <text:p>0.00</text:p>
          </table:table-cell>
          <table:table-cell table:style-name="ce373" table:formula="of:=IF([.A157]=0;0;(PMT([.$C$3];[.$C$4];-[.$C$2])))" office:value-type="float" office:value="0" calcext:value-type="float">
            <text:p>0.00</text:p>
          </table:table-cell>
          <table:table-cell table:style-name="ce373" table:formula="of:=IF([.A157]=0;0;([.$C$2]-[.F157]))" office:value-type="float" office:value="0" calcext:value-type="float">
            <text:p>0.00</text:p>
          </table:table-cell>
          <table:table-cell table:style-name="ce373" table:formula="of:=IF([.A157]=0;0;([.B157]+[.F15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7]&gt;=[.$C$4];0;IF([.A157]=0;0;(1+[.A157])))" office:value-type="float" office:value="0" calcext:value-type="float">
            <text:p>0</text:p>
          </table:table-cell>
          <table:table-cell table:style-name="ce373" table:formula="of:=IF([.A158]=0;0;(PPMT([.$C$3];[.A158];[.$C$4];-[.$C$2])))" office:value-type="float" office:value="0" calcext:value-type="float">
            <text:p>0.00</text:p>
          </table:table-cell>
          <table:table-cell table:style-name="ce373" table:formula="of:=IF([.A158]=0;0;(IPMT([.$C$3];[.A158];[.$C$4];-[.$C$2])))" office:value-type="float" office:value="0" calcext:value-type="float">
            <text:p>0.00</text:p>
          </table:table-cell>
          <table:table-cell table:style-name="ce373" table:formula="of:=IF([.A158]=0;0;(PMT([.$C$3];[.$C$4];-[.$C$2])))" office:value-type="float" office:value="0" calcext:value-type="float">
            <text:p>0.00</text:p>
          </table:table-cell>
          <table:table-cell table:style-name="ce373" table:formula="of:=IF([.A158]=0;0;([.$C$2]-[.F158]))" office:value-type="float" office:value="0" calcext:value-type="float">
            <text:p>0.00</text:p>
          </table:table-cell>
          <table:table-cell table:style-name="ce373" table:formula="of:=IF([.A158]=0;0;([.B158]+[.F15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8]&gt;=[.$C$4];0;IF([.A158]=0;0;(1+[.A158])))" office:value-type="float" office:value="0" calcext:value-type="float">
            <text:p>0</text:p>
          </table:table-cell>
          <table:table-cell table:style-name="ce373" table:formula="of:=IF([.A159]=0;0;(PPMT([.$C$3];[.A159];[.$C$4];-[.$C$2])))" office:value-type="float" office:value="0" calcext:value-type="float">
            <text:p>0.00</text:p>
          </table:table-cell>
          <table:table-cell table:style-name="ce373" table:formula="of:=IF([.A159]=0;0;(IPMT([.$C$3];[.A159];[.$C$4];-[.$C$2])))" office:value-type="float" office:value="0" calcext:value-type="float">
            <text:p>0.00</text:p>
          </table:table-cell>
          <table:table-cell table:style-name="ce373" table:formula="of:=IF([.A159]=0;0;(PMT([.$C$3];[.$C$4];-[.$C$2])))" office:value-type="float" office:value="0" calcext:value-type="float">
            <text:p>0.00</text:p>
          </table:table-cell>
          <table:table-cell table:style-name="ce373" table:formula="of:=IF([.A159]=0;0;([.$C$2]-[.F159]))" office:value-type="float" office:value="0" calcext:value-type="float">
            <text:p>0.00</text:p>
          </table:table-cell>
          <table:table-cell table:style-name="ce373" table:formula="of:=IF([.A159]=0;0;([.B159]+[.F15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59]&gt;=[.$C$4];0;IF([.A159]=0;0;(1+[.A159])))" office:value-type="float" office:value="0" calcext:value-type="float">
            <text:p>0</text:p>
          </table:table-cell>
          <table:table-cell table:style-name="ce373" table:formula="of:=IF([.A160]=0;0;(PPMT([.$C$3];[.A160];[.$C$4];-[.$C$2])))" office:value-type="float" office:value="0" calcext:value-type="float">
            <text:p>0.00</text:p>
          </table:table-cell>
          <table:table-cell table:style-name="ce373" table:formula="of:=IF([.A160]=0;0;(IPMT([.$C$3];[.A160];[.$C$4];-[.$C$2])))" office:value-type="float" office:value="0" calcext:value-type="float">
            <text:p>0.00</text:p>
          </table:table-cell>
          <table:table-cell table:style-name="ce373" table:formula="of:=IF([.A160]=0;0;(PMT([.$C$3];[.$C$4];-[.$C$2])))" office:value-type="float" office:value="0" calcext:value-type="float">
            <text:p>0.00</text:p>
          </table:table-cell>
          <table:table-cell table:style-name="ce373" table:formula="of:=IF([.A160]=0;0;([.$C$2]-[.F160]))" office:value-type="float" office:value="0" calcext:value-type="float">
            <text:p>0.00</text:p>
          </table:table-cell>
          <table:table-cell table:style-name="ce373" table:formula="of:=IF([.A160]=0;0;([.B160]+[.F15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0]&gt;=[.$C$4];0;IF([.A160]=0;0;(1+[.A160])))" office:value-type="float" office:value="0" calcext:value-type="float">
            <text:p>0</text:p>
          </table:table-cell>
          <table:table-cell table:style-name="ce373" table:formula="of:=IF([.A161]=0;0;(PPMT([.$C$3];[.A161];[.$C$4];-[.$C$2])))" office:value-type="float" office:value="0" calcext:value-type="float">
            <text:p>0.00</text:p>
          </table:table-cell>
          <table:table-cell table:style-name="ce373" table:formula="of:=IF([.A161]=0;0;(IPMT([.$C$3];[.A161];[.$C$4];-[.$C$2])))" office:value-type="float" office:value="0" calcext:value-type="float">
            <text:p>0.00</text:p>
          </table:table-cell>
          <table:table-cell table:style-name="ce373" table:formula="of:=IF([.A161]=0;0;(PMT([.$C$3];[.$C$4];-[.$C$2])))" office:value-type="float" office:value="0" calcext:value-type="float">
            <text:p>0.00</text:p>
          </table:table-cell>
          <table:table-cell table:style-name="ce373" table:formula="of:=IF([.A161]=0;0;([.$C$2]-[.F161]))" office:value-type="float" office:value="0" calcext:value-type="float">
            <text:p>0.00</text:p>
          </table:table-cell>
          <table:table-cell table:style-name="ce373" table:formula="of:=IF([.A161]=0;0;([.B161]+[.F16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1]&gt;=[.$C$4];0;IF([.A161]=0;0;(1+[.A161])))" office:value-type="float" office:value="0" calcext:value-type="float">
            <text:p>0</text:p>
          </table:table-cell>
          <table:table-cell table:style-name="ce373" table:formula="of:=IF([.A162]=0;0;(PPMT([.$C$3];[.A162];[.$C$4];-[.$C$2])))" office:value-type="float" office:value="0" calcext:value-type="float">
            <text:p>0.00</text:p>
          </table:table-cell>
          <table:table-cell table:style-name="ce373" table:formula="of:=IF([.A162]=0;0;(IPMT([.$C$3];[.A162];[.$C$4];-[.$C$2])))" office:value-type="float" office:value="0" calcext:value-type="float">
            <text:p>0.00</text:p>
          </table:table-cell>
          <table:table-cell table:style-name="ce373" table:formula="of:=IF([.A162]=0;0;(PMT([.$C$3];[.$C$4];-[.$C$2])))" office:value-type="float" office:value="0" calcext:value-type="float">
            <text:p>0.00</text:p>
          </table:table-cell>
          <table:table-cell table:style-name="ce373" table:formula="of:=IF([.A162]=0;0;([.$C$2]-[.F162]))" office:value-type="float" office:value="0" calcext:value-type="float">
            <text:p>0.00</text:p>
          </table:table-cell>
          <table:table-cell table:style-name="ce373" table:formula="of:=IF([.A162]=0;0;([.B162]+[.F16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2]&gt;=[.$C$4];0;IF([.A162]=0;0;(1+[.A162])))" office:value-type="float" office:value="0" calcext:value-type="float">
            <text:p>0</text:p>
          </table:table-cell>
          <table:table-cell table:style-name="ce373" table:formula="of:=IF([.A163]=0;0;(PPMT([.$C$3];[.A163];[.$C$4];-[.$C$2])))" office:value-type="float" office:value="0" calcext:value-type="float">
            <text:p>0.00</text:p>
          </table:table-cell>
          <table:table-cell table:style-name="ce373" table:formula="of:=IF([.A163]=0;0;(IPMT([.$C$3];[.A163];[.$C$4];-[.$C$2])))" office:value-type="float" office:value="0" calcext:value-type="float">
            <text:p>0.00</text:p>
          </table:table-cell>
          <table:table-cell table:style-name="ce373" table:formula="of:=IF([.A163]=0;0;(PMT([.$C$3];[.$C$4];-[.$C$2])))" office:value-type="float" office:value="0" calcext:value-type="float">
            <text:p>0.00</text:p>
          </table:table-cell>
          <table:table-cell table:style-name="ce373" table:formula="of:=IF([.A163]=0;0;([.$C$2]-[.F163]))" office:value-type="float" office:value="0" calcext:value-type="float">
            <text:p>0.00</text:p>
          </table:table-cell>
          <table:table-cell table:style-name="ce373" table:formula="of:=IF([.A163]=0;0;([.B163]+[.F16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3]&gt;=[.$C$4];0;IF([.A163]=0;0;(1+[.A163])))" office:value-type="float" office:value="0" calcext:value-type="float">
            <text:p>0</text:p>
          </table:table-cell>
          <table:table-cell table:style-name="ce373" table:formula="of:=IF([.A164]=0;0;(PPMT([.$C$3];[.A164];[.$C$4];-[.$C$2])))" office:value-type="float" office:value="0" calcext:value-type="float">
            <text:p>0.00</text:p>
          </table:table-cell>
          <table:table-cell table:style-name="ce373" table:formula="of:=IF([.A164]=0;0;(IPMT([.$C$3];[.A164];[.$C$4];-[.$C$2])))" office:value-type="float" office:value="0" calcext:value-type="float">
            <text:p>0.00</text:p>
          </table:table-cell>
          <table:table-cell table:style-name="ce373" table:formula="of:=IF([.A164]=0;0;(PMT([.$C$3];[.$C$4];-[.$C$2])))" office:value-type="float" office:value="0" calcext:value-type="float">
            <text:p>0.00</text:p>
          </table:table-cell>
          <table:table-cell table:style-name="ce373" table:formula="of:=IF([.A164]=0;0;([.$C$2]-[.F164]))" office:value-type="float" office:value="0" calcext:value-type="float">
            <text:p>0.00</text:p>
          </table:table-cell>
          <table:table-cell table:style-name="ce373" table:formula="of:=IF([.A164]=0;0;([.B164]+[.F16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4]&gt;=[.$C$4];0;IF([.A164]=0;0;(1+[.A164])))" office:value-type="float" office:value="0" calcext:value-type="float">
            <text:p>0</text:p>
          </table:table-cell>
          <table:table-cell table:style-name="ce373" table:formula="of:=IF([.A165]=0;0;(PPMT([.$C$3];[.A165];[.$C$4];-[.$C$2])))" office:value-type="float" office:value="0" calcext:value-type="float">
            <text:p>0.00</text:p>
          </table:table-cell>
          <table:table-cell table:style-name="ce373" table:formula="of:=IF([.A165]=0;0;(IPMT([.$C$3];[.A165];[.$C$4];-[.$C$2])))" office:value-type="float" office:value="0" calcext:value-type="float">
            <text:p>0.00</text:p>
          </table:table-cell>
          <table:table-cell table:style-name="ce373" table:formula="of:=IF([.A165]=0;0;(PMT([.$C$3];[.$C$4];-[.$C$2])))" office:value-type="float" office:value="0" calcext:value-type="float">
            <text:p>0.00</text:p>
          </table:table-cell>
          <table:table-cell table:style-name="ce373" table:formula="of:=IF([.A165]=0;0;([.$C$2]-[.F165]))" office:value-type="float" office:value="0" calcext:value-type="float">
            <text:p>0.00</text:p>
          </table:table-cell>
          <table:table-cell table:style-name="ce373" table:formula="of:=IF([.A165]=0;0;([.B165]+[.F16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5]&gt;=[.$C$4];0;IF([.A165]=0;0;(1+[.A165])))" office:value-type="float" office:value="0" calcext:value-type="float">
            <text:p>0</text:p>
          </table:table-cell>
          <table:table-cell table:style-name="ce373" table:formula="of:=IF([.A166]=0;0;(PPMT([.$C$3];[.A166];[.$C$4];-[.$C$2])))" office:value-type="float" office:value="0" calcext:value-type="float">
            <text:p>0.00</text:p>
          </table:table-cell>
          <table:table-cell table:style-name="ce373" table:formula="of:=IF([.A166]=0;0;(IPMT([.$C$3];[.A166];[.$C$4];-[.$C$2])))" office:value-type="float" office:value="0" calcext:value-type="float">
            <text:p>0.00</text:p>
          </table:table-cell>
          <table:table-cell table:style-name="ce373" table:formula="of:=IF([.A166]=0;0;(PMT([.$C$3];[.$C$4];-[.$C$2])))" office:value-type="float" office:value="0" calcext:value-type="float">
            <text:p>0.00</text:p>
          </table:table-cell>
          <table:table-cell table:style-name="ce373" table:formula="of:=IF([.A166]=0;0;([.$C$2]-[.F166]))" office:value-type="float" office:value="0" calcext:value-type="float">
            <text:p>0.00</text:p>
          </table:table-cell>
          <table:table-cell table:style-name="ce373" table:formula="of:=IF([.A166]=0;0;([.B166]+[.F16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6]&gt;=[.$C$4];0;IF([.A166]=0;0;(1+[.A166])))" office:value-type="float" office:value="0" calcext:value-type="float">
            <text:p>0</text:p>
          </table:table-cell>
          <table:table-cell table:style-name="ce373" table:formula="of:=IF([.A167]=0;0;(PPMT([.$C$3];[.A167];[.$C$4];-[.$C$2])))" office:value-type="float" office:value="0" calcext:value-type="float">
            <text:p>0.00</text:p>
          </table:table-cell>
          <table:table-cell table:style-name="ce373" table:formula="of:=IF([.A167]=0;0;(IPMT([.$C$3];[.A167];[.$C$4];-[.$C$2])))" office:value-type="float" office:value="0" calcext:value-type="float">
            <text:p>0.00</text:p>
          </table:table-cell>
          <table:table-cell table:style-name="ce373" table:formula="of:=IF([.A167]=0;0;(PMT([.$C$3];[.$C$4];-[.$C$2])))" office:value-type="float" office:value="0" calcext:value-type="float">
            <text:p>0.00</text:p>
          </table:table-cell>
          <table:table-cell table:style-name="ce373" table:formula="of:=IF([.A167]=0;0;([.$C$2]-[.F167]))" office:value-type="float" office:value="0" calcext:value-type="float">
            <text:p>0.00</text:p>
          </table:table-cell>
          <table:table-cell table:style-name="ce373" table:formula="of:=IF([.A167]=0;0;([.B167]+[.F16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7]&gt;=[.$C$4];0;IF([.A167]=0;0;(1+[.A167])))" office:value-type="float" office:value="0" calcext:value-type="float">
            <text:p>0</text:p>
          </table:table-cell>
          <table:table-cell table:style-name="ce373" table:formula="of:=IF([.A168]=0;0;(PPMT([.$C$3];[.A168];[.$C$4];-[.$C$2])))" office:value-type="float" office:value="0" calcext:value-type="float">
            <text:p>0.00</text:p>
          </table:table-cell>
          <table:table-cell table:style-name="ce373" table:formula="of:=IF([.A168]=0;0;(IPMT([.$C$3];[.A168];[.$C$4];-[.$C$2])))" office:value-type="float" office:value="0" calcext:value-type="float">
            <text:p>0.00</text:p>
          </table:table-cell>
          <table:table-cell table:style-name="ce373" table:formula="of:=IF([.A168]=0;0;(PMT([.$C$3];[.$C$4];-[.$C$2])))" office:value-type="float" office:value="0" calcext:value-type="float">
            <text:p>0.00</text:p>
          </table:table-cell>
          <table:table-cell table:style-name="ce373" table:formula="of:=IF([.A168]=0;0;([.$C$2]-[.F168]))" office:value-type="float" office:value="0" calcext:value-type="float">
            <text:p>0.00</text:p>
          </table:table-cell>
          <table:table-cell table:style-name="ce373" table:formula="of:=IF([.A168]=0;0;([.B168]+[.F16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8]&gt;=[.$C$4];0;IF([.A168]=0;0;(1+[.A168])))" office:value-type="float" office:value="0" calcext:value-type="float">
            <text:p>0</text:p>
          </table:table-cell>
          <table:table-cell table:style-name="ce373" table:formula="of:=IF([.A169]=0;0;(PPMT([.$C$3];[.A169];[.$C$4];-[.$C$2])))" office:value-type="float" office:value="0" calcext:value-type="float">
            <text:p>0.00</text:p>
          </table:table-cell>
          <table:table-cell table:style-name="ce373" table:formula="of:=IF([.A169]=0;0;(IPMT([.$C$3];[.A169];[.$C$4];-[.$C$2])))" office:value-type="float" office:value="0" calcext:value-type="float">
            <text:p>0.00</text:p>
          </table:table-cell>
          <table:table-cell table:style-name="ce373" table:formula="of:=IF([.A169]=0;0;(PMT([.$C$3];[.$C$4];-[.$C$2])))" office:value-type="float" office:value="0" calcext:value-type="float">
            <text:p>0.00</text:p>
          </table:table-cell>
          <table:table-cell table:style-name="ce373" table:formula="of:=IF([.A169]=0;0;([.$C$2]-[.F169]))" office:value-type="float" office:value="0" calcext:value-type="float">
            <text:p>0.00</text:p>
          </table:table-cell>
          <table:table-cell table:style-name="ce373" table:formula="of:=IF([.A169]=0;0;([.B169]+[.F16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69]&gt;=[.$C$4];0;IF([.A169]=0;0;(1+[.A169])))" office:value-type="float" office:value="0" calcext:value-type="float">
            <text:p>0</text:p>
          </table:table-cell>
          <table:table-cell table:style-name="ce373" table:formula="of:=IF([.A170]=0;0;(PPMT([.$C$3];[.A170];[.$C$4];-[.$C$2])))" office:value-type="float" office:value="0" calcext:value-type="float">
            <text:p>0.00</text:p>
          </table:table-cell>
          <table:table-cell table:style-name="ce373" table:formula="of:=IF([.A170]=0;0;(IPMT([.$C$3];[.A170];[.$C$4];-[.$C$2])))" office:value-type="float" office:value="0" calcext:value-type="float">
            <text:p>0.00</text:p>
          </table:table-cell>
          <table:table-cell table:style-name="ce373" table:formula="of:=IF([.A170]=0;0;(PMT([.$C$3];[.$C$4];-[.$C$2])))" office:value-type="float" office:value="0" calcext:value-type="float">
            <text:p>0.00</text:p>
          </table:table-cell>
          <table:table-cell table:style-name="ce373" table:formula="of:=IF([.A170]=0;0;([.$C$2]-[.F170]))" office:value-type="float" office:value="0" calcext:value-type="float">
            <text:p>0.00</text:p>
          </table:table-cell>
          <table:table-cell table:style-name="ce373" table:formula="of:=IF([.A170]=0;0;([.B170]+[.F16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0]&gt;=[.$C$4];0;IF([.A170]=0;0;(1+[.A170])))" office:value-type="float" office:value="0" calcext:value-type="float">
            <text:p>0</text:p>
          </table:table-cell>
          <table:table-cell table:style-name="ce373" table:formula="of:=IF([.A171]=0;0;(PPMT([.$C$3];[.A171];[.$C$4];-[.$C$2])))" office:value-type="float" office:value="0" calcext:value-type="float">
            <text:p>0.00</text:p>
          </table:table-cell>
          <table:table-cell table:style-name="ce373" table:formula="of:=IF([.A171]=0;0;(IPMT([.$C$3];[.A171];[.$C$4];-[.$C$2])))" office:value-type="float" office:value="0" calcext:value-type="float">
            <text:p>0.00</text:p>
          </table:table-cell>
          <table:table-cell table:style-name="ce373" table:formula="of:=IF([.A171]=0;0;(PMT([.$C$3];[.$C$4];-[.$C$2])))" office:value-type="float" office:value="0" calcext:value-type="float">
            <text:p>0.00</text:p>
          </table:table-cell>
          <table:table-cell table:style-name="ce373" table:formula="of:=IF([.A171]=0;0;([.$C$2]-[.F171]))" office:value-type="float" office:value="0" calcext:value-type="float">
            <text:p>0.00</text:p>
          </table:table-cell>
          <table:table-cell table:style-name="ce373" table:formula="of:=IF([.A171]=0;0;([.B171]+[.F17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1]&gt;=[.$C$4];0;IF([.A171]=0;0;(1+[.A171])))" office:value-type="float" office:value="0" calcext:value-type="float">
            <text:p>0</text:p>
          </table:table-cell>
          <table:table-cell table:style-name="ce373" table:formula="of:=IF([.A172]=0;0;(PPMT([.$C$3];[.A172];[.$C$4];-[.$C$2])))" office:value-type="float" office:value="0" calcext:value-type="float">
            <text:p>0.00</text:p>
          </table:table-cell>
          <table:table-cell table:style-name="ce373" table:formula="of:=IF([.A172]=0;0;(IPMT([.$C$3];[.A172];[.$C$4];-[.$C$2])))" office:value-type="float" office:value="0" calcext:value-type="float">
            <text:p>0.00</text:p>
          </table:table-cell>
          <table:table-cell table:style-name="ce373" table:formula="of:=IF([.A172]=0;0;(PMT([.$C$3];[.$C$4];-[.$C$2])))" office:value-type="float" office:value="0" calcext:value-type="float">
            <text:p>0.00</text:p>
          </table:table-cell>
          <table:table-cell table:style-name="ce373" table:formula="of:=IF([.A172]=0;0;([.$C$2]-[.F172]))" office:value-type="float" office:value="0" calcext:value-type="float">
            <text:p>0.00</text:p>
          </table:table-cell>
          <table:table-cell table:style-name="ce373" table:formula="of:=IF([.A172]=0;0;([.B172]+[.F17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2]&gt;=[.$C$4];0;IF([.A172]=0;0;(1+[.A172])))" office:value-type="float" office:value="0" calcext:value-type="float">
            <text:p>0</text:p>
          </table:table-cell>
          <table:table-cell table:style-name="ce373" table:formula="of:=IF([.A173]=0;0;(PPMT([.$C$3];[.A173];[.$C$4];-[.$C$2])))" office:value-type="float" office:value="0" calcext:value-type="float">
            <text:p>0.00</text:p>
          </table:table-cell>
          <table:table-cell table:style-name="ce373" table:formula="of:=IF([.A173]=0;0;(IPMT([.$C$3];[.A173];[.$C$4];-[.$C$2])))" office:value-type="float" office:value="0" calcext:value-type="float">
            <text:p>0.00</text:p>
          </table:table-cell>
          <table:table-cell table:style-name="ce373" table:formula="of:=IF([.A173]=0;0;(PMT([.$C$3];[.$C$4];-[.$C$2])))" office:value-type="float" office:value="0" calcext:value-type="float">
            <text:p>0.00</text:p>
          </table:table-cell>
          <table:table-cell table:style-name="ce373" table:formula="of:=IF([.A173]=0;0;([.$C$2]-[.F173]))" office:value-type="float" office:value="0" calcext:value-type="float">
            <text:p>0.00</text:p>
          </table:table-cell>
          <table:table-cell table:style-name="ce373" table:formula="of:=IF([.A173]=0;0;([.B173]+[.F17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3]&gt;=[.$C$4];0;IF([.A173]=0;0;(1+[.A173])))" office:value-type="float" office:value="0" calcext:value-type="float">
            <text:p>0</text:p>
          </table:table-cell>
          <table:table-cell table:style-name="ce373" table:formula="of:=IF([.A174]=0;0;(PPMT([.$C$3];[.A174];[.$C$4];-[.$C$2])))" office:value-type="float" office:value="0" calcext:value-type="float">
            <text:p>0.00</text:p>
          </table:table-cell>
          <table:table-cell table:style-name="ce373" table:formula="of:=IF([.A174]=0;0;(IPMT([.$C$3];[.A174];[.$C$4];-[.$C$2])))" office:value-type="float" office:value="0" calcext:value-type="float">
            <text:p>0.00</text:p>
          </table:table-cell>
          <table:table-cell table:style-name="ce373" table:formula="of:=IF([.A174]=0;0;(PMT([.$C$3];[.$C$4];-[.$C$2])))" office:value-type="float" office:value="0" calcext:value-type="float">
            <text:p>0.00</text:p>
          </table:table-cell>
          <table:table-cell table:style-name="ce373" table:formula="of:=IF([.A174]=0;0;([.$C$2]-[.F174]))" office:value-type="float" office:value="0" calcext:value-type="float">
            <text:p>0.00</text:p>
          </table:table-cell>
          <table:table-cell table:style-name="ce373" table:formula="of:=IF([.A174]=0;0;([.B174]+[.F17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4]&gt;=[.$C$4];0;IF([.A174]=0;0;(1+[.A174])))" office:value-type="float" office:value="0" calcext:value-type="float">
            <text:p>0</text:p>
          </table:table-cell>
          <table:table-cell table:style-name="ce373" table:formula="of:=IF([.A175]=0;0;(PPMT([.$C$3];[.A175];[.$C$4];-[.$C$2])))" office:value-type="float" office:value="0" calcext:value-type="float">
            <text:p>0.00</text:p>
          </table:table-cell>
          <table:table-cell table:style-name="ce373" table:formula="of:=IF([.A175]=0;0;(IPMT([.$C$3];[.A175];[.$C$4];-[.$C$2])))" office:value-type="float" office:value="0" calcext:value-type="float">
            <text:p>0.00</text:p>
          </table:table-cell>
          <table:table-cell table:style-name="ce373" table:formula="of:=IF([.A175]=0;0;(PMT([.$C$3];[.$C$4];-[.$C$2])))" office:value-type="float" office:value="0" calcext:value-type="float">
            <text:p>0.00</text:p>
          </table:table-cell>
          <table:table-cell table:style-name="ce373" table:formula="of:=IF([.A175]=0;0;([.$C$2]-[.F175]))" office:value-type="float" office:value="0" calcext:value-type="float">
            <text:p>0.00</text:p>
          </table:table-cell>
          <table:table-cell table:style-name="ce373" table:formula="of:=IF([.A175]=0;0;([.B175]+[.F17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5]&gt;=[.$C$4];0;IF([.A175]=0;0;(1+[.A175])))" office:value-type="float" office:value="0" calcext:value-type="float">
            <text:p>0</text:p>
          </table:table-cell>
          <table:table-cell table:style-name="ce373" table:formula="of:=IF([.A176]=0;0;(PPMT([.$C$3];[.A176];[.$C$4];-[.$C$2])))" office:value-type="float" office:value="0" calcext:value-type="float">
            <text:p>0.00</text:p>
          </table:table-cell>
          <table:table-cell table:style-name="ce373" table:formula="of:=IF([.A176]=0;0;(IPMT([.$C$3];[.A176];[.$C$4];-[.$C$2])))" office:value-type="float" office:value="0" calcext:value-type="float">
            <text:p>0.00</text:p>
          </table:table-cell>
          <table:table-cell table:style-name="ce373" table:formula="of:=IF([.A176]=0;0;(PMT([.$C$3];[.$C$4];-[.$C$2])))" office:value-type="float" office:value="0" calcext:value-type="float">
            <text:p>0.00</text:p>
          </table:table-cell>
          <table:table-cell table:style-name="ce373" table:formula="of:=IF([.A176]=0;0;([.$C$2]-[.F176]))" office:value-type="float" office:value="0" calcext:value-type="float">
            <text:p>0.00</text:p>
          </table:table-cell>
          <table:table-cell table:style-name="ce373" table:formula="of:=IF([.A176]=0;0;([.B176]+[.F17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6]&gt;=[.$C$4];0;IF([.A176]=0;0;(1+[.A176])))" office:value-type="float" office:value="0" calcext:value-type="float">
            <text:p>0</text:p>
          </table:table-cell>
          <table:table-cell table:style-name="ce373" table:formula="of:=IF([.A177]=0;0;(PPMT([.$C$3];[.A177];[.$C$4];-[.$C$2])))" office:value-type="float" office:value="0" calcext:value-type="float">
            <text:p>0.00</text:p>
          </table:table-cell>
          <table:table-cell table:style-name="ce373" table:formula="of:=IF([.A177]=0;0;(IPMT([.$C$3];[.A177];[.$C$4];-[.$C$2])))" office:value-type="float" office:value="0" calcext:value-type="float">
            <text:p>0.00</text:p>
          </table:table-cell>
          <table:table-cell table:style-name="ce373" table:formula="of:=IF([.A177]=0;0;(PMT([.$C$3];[.$C$4];-[.$C$2])))" office:value-type="float" office:value="0" calcext:value-type="float">
            <text:p>0.00</text:p>
          </table:table-cell>
          <table:table-cell table:style-name="ce373" table:formula="of:=IF([.A177]=0;0;([.$C$2]-[.F177]))" office:value-type="float" office:value="0" calcext:value-type="float">
            <text:p>0.00</text:p>
          </table:table-cell>
          <table:table-cell table:style-name="ce373" table:formula="of:=IF([.A177]=0;0;([.B177]+[.F17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7]&gt;=[.$C$4];0;IF([.A177]=0;0;(1+[.A177])))" office:value-type="float" office:value="0" calcext:value-type="float">
            <text:p>0</text:p>
          </table:table-cell>
          <table:table-cell table:style-name="ce373" table:formula="of:=IF([.A178]=0;0;(PPMT([.$C$3];[.A178];[.$C$4];-[.$C$2])))" office:value-type="float" office:value="0" calcext:value-type="float">
            <text:p>0.00</text:p>
          </table:table-cell>
          <table:table-cell table:style-name="ce373" table:formula="of:=IF([.A178]=0;0;(IPMT([.$C$3];[.A178];[.$C$4];-[.$C$2])))" office:value-type="float" office:value="0" calcext:value-type="float">
            <text:p>0.00</text:p>
          </table:table-cell>
          <table:table-cell table:style-name="ce373" table:formula="of:=IF([.A178]=0;0;(PMT([.$C$3];[.$C$4];-[.$C$2])))" office:value-type="float" office:value="0" calcext:value-type="float">
            <text:p>0.00</text:p>
          </table:table-cell>
          <table:table-cell table:style-name="ce373" table:formula="of:=IF([.A178]=0;0;([.$C$2]-[.F178]))" office:value-type="float" office:value="0" calcext:value-type="float">
            <text:p>0.00</text:p>
          </table:table-cell>
          <table:table-cell table:style-name="ce373" table:formula="of:=IF([.A178]=0;0;([.B178]+[.F17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8]&gt;=[.$C$4];0;IF([.A178]=0;0;(1+[.A178])))" office:value-type="float" office:value="0" calcext:value-type="float">
            <text:p>0</text:p>
          </table:table-cell>
          <table:table-cell table:style-name="ce373" table:formula="of:=IF([.A179]=0;0;(PPMT([.$C$3];[.A179];[.$C$4];-[.$C$2])))" office:value-type="float" office:value="0" calcext:value-type="float">
            <text:p>0.00</text:p>
          </table:table-cell>
          <table:table-cell table:style-name="ce373" table:formula="of:=IF([.A179]=0;0;(IPMT([.$C$3];[.A179];[.$C$4];-[.$C$2])))" office:value-type="float" office:value="0" calcext:value-type="float">
            <text:p>0.00</text:p>
          </table:table-cell>
          <table:table-cell table:style-name="ce373" table:formula="of:=IF([.A179]=0;0;(PMT([.$C$3];[.$C$4];-[.$C$2])))" office:value-type="float" office:value="0" calcext:value-type="float">
            <text:p>0.00</text:p>
          </table:table-cell>
          <table:table-cell table:style-name="ce373" table:formula="of:=IF([.A179]=0;0;([.$C$2]-[.F179]))" office:value-type="float" office:value="0" calcext:value-type="float">
            <text:p>0.00</text:p>
          </table:table-cell>
          <table:table-cell table:style-name="ce373" table:formula="of:=IF([.A179]=0;0;([.B179]+[.F17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79]&gt;=[.$C$4];0;IF([.A179]=0;0;(1+[.A179])))" office:value-type="float" office:value="0" calcext:value-type="float">
            <text:p>0</text:p>
          </table:table-cell>
          <table:table-cell table:style-name="ce373" table:formula="of:=IF([.A180]=0;0;(PPMT([.$C$3];[.A180];[.$C$4];-[.$C$2])))" office:value-type="float" office:value="0" calcext:value-type="float">
            <text:p>0.00</text:p>
          </table:table-cell>
          <table:table-cell table:style-name="ce373" table:formula="of:=IF([.A180]=0;0;(IPMT([.$C$3];[.A180];[.$C$4];-[.$C$2])))" office:value-type="float" office:value="0" calcext:value-type="float">
            <text:p>0.00</text:p>
          </table:table-cell>
          <table:table-cell table:style-name="ce373" table:formula="of:=IF([.A180]=0;0;(PMT([.$C$3];[.$C$4];-[.$C$2])))" office:value-type="float" office:value="0" calcext:value-type="float">
            <text:p>0.00</text:p>
          </table:table-cell>
          <table:table-cell table:style-name="ce373" table:formula="of:=IF([.A180]=0;0;([.$C$2]-[.F180]))" office:value-type="float" office:value="0" calcext:value-type="float">
            <text:p>0.00</text:p>
          </table:table-cell>
          <table:table-cell table:style-name="ce373" table:formula="of:=IF([.A180]=0;0;([.B180]+[.F17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0]&gt;=[.$C$4];0;IF([.A180]=0;0;(1+[.A180])))" office:value-type="float" office:value="0" calcext:value-type="float">
            <text:p>0</text:p>
          </table:table-cell>
          <table:table-cell table:style-name="ce373" table:formula="of:=IF([.A181]=0;0;(PPMT([.$C$3];[.A181];[.$C$4];-[.$C$2])))" office:value-type="float" office:value="0" calcext:value-type="float">
            <text:p>0.00</text:p>
          </table:table-cell>
          <table:table-cell table:style-name="ce373" table:formula="of:=IF([.A181]=0;0;(IPMT([.$C$3];[.A181];[.$C$4];-[.$C$2])))" office:value-type="float" office:value="0" calcext:value-type="float">
            <text:p>0.00</text:p>
          </table:table-cell>
          <table:table-cell table:style-name="ce373" table:formula="of:=IF([.A181]=0;0;(PMT([.$C$3];[.$C$4];-[.$C$2])))" office:value-type="float" office:value="0" calcext:value-type="float">
            <text:p>0.00</text:p>
          </table:table-cell>
          <table:table-cell table:style-name="ce373" table:formula="of:=IF([.A181]=0;0;([.$C$2]-[.F181]))" office:value-type="float" office:value="0" calcext:value-type="float">
            <text:p>0.00</text:p>
          </table:table-cell>
          <table:table-cell table:style-name="ce373" table:formula="of:=IF([.A181]=0;0;([.B181]+[.F18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1]&gt;=[.$C$4];0;IF([.A181]=0;0;(1+[.A181])))" office:value-type="float" office:value="0" calcext:value-type="float">
            <text:p>0</text:p>
          </table:table-cell>
          <table:table-cell table:style-name="ce373" table:formula="of:=IF([.A182]=0;0;(PPMT([.$C$3];[.A182];[.$C$4];-[.$C$2])))" office:value-type="float" office:value="0" calcext:value-type="float">
            <text:p>0.00</text:p>
          </table:table-cell>
          <table:table-cell table:style-name="ce373" table:formula="of:=IF([.A182]=0;0;(IPMT([.$C$3];[.A182];[.$C$4];-[.$C$2])))" office:value-type="float" office:value="0" calcext:value-type="float">
            <text:p>0.00</text:p>
          </table:table-cell>
          <table:table-cell table:style-name="ce373" table:formula="of:=IF([.A182]=0;0;(PMT([.$C$3];[.$C$4];-[.$C$2])))" office:value-type="float" office:value="0" calcext:value-type="float">
            <text:p>0.00</text:p>
          </table:table-cell>
          <table:table-cell table:style-name="ce373" table:formula="of:=IF([.A182]=0;0;([.$C$2]-[.F182]))" office:value-type="float" office:value="0" calcext:value-type="float">
            <text:p>0.00</text:p>
          </table:table-cell>
          <table:table-cell table:style-name="ce373" table:formula="of:=IF([.A182]=0;0;([.B182]+[.F18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2]&gt;=[.$C$4];0;IF([.A182]=0;0;(1+[.A182])))" office:value-type="float" office:value="0" calcext:value-type="float">
            <text:p>0</text:p>
          </table:table-cell>
          <table:table-cell table:style-name="ce373" table:formula="of:=IF([.A183]=0;0;(PPMT([.$C$3];[.A183];[.$C$4];-[.$C$2])))" office:value-type="float" office:value="0" calcext:value-type="float">
            <text:p>0.00</text:p>
          </table:table-cell>
          <table:table-cell table:style-name="ce373" table:formula="of:=IF([.A183]=0;0;(IPMT([.$C$3];[.A183];[.$C$4];-[.$C$2])))" office:value-type="float" office:value="0" calcext:value-type="float">
            <text:p>0.00</text:p>
          </table:table-cell>
          <table:table-cell table:style-name="ce373" table:formula="of:=IF([.A183]=0;0;(PMT([.$C$3];[.$C$4];-[.$C$2])))" office:value-type="float" office:value="0" calcext:value-type="float">
            <text:p>0.00</text:p>
          </table:table-cell>
          <table:table-cell table:style-name="ce373" table:formula="of:=IF([.A183]=0;0;([.$C$2]-[.F183]))" office:value-type="float" office:value="0" calcext:value-type="float">
            <text:p>0.00</text:p>
          </table:table-cell>
          <table:table-cell table:style-name="ce373" table:formula="of:=IF([.A183]=0;0;([.B183]+[.F18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3]&gt;=[.$C$4];0;IF([.A183]=0;0;(1+[.A183])))" office:value-type="float" office:value="0" calcext:value-type="float">
            <text:p>0</text:p>
          </table:table-cell>
          <table:table-cell table:style-name="ce373" table:formula="of:=IF([.A184]=0;0;(PPMT([.$C$3];[.A184];[.$C$4];-[.$C$2])))" office:value-type="float" office:value="0" calcext:value-type="float">
            <text:p>0.00</text:p>
          </table:table-cell>
          <table:table-cell table:style-name="ce373" table:formula="of:=IF([.A184]=0;0;(IPMT([.$C$3];[.A184];[.$C$4];-[.$C$2])))" office:value-type="float" office:value="0" calcext:value-type="float">
            <text:p>0.00</text:p>
          </table:table-cell>
          <table:table-cell table:style-name="ce373" table:formula="of:=IF([.A184]=0;0;(PMT([.$C$3];[.$C$4];-[.$C$2])))" office:value-type="float" office:value="0" calcext:value-type="float">
            <text:p>0.00</text:p>
          </table:table-cell>
          <table:table-cell table:style-name="ce373" table:formula="of:=IF([.A184]=0;0;([.$C$2]-[.F184]))" office:value-type="float" office:value="0" calcext:value-type="float">
            <text:p>0.00</text:p>
          </table:table-cell>
          <table:table-cell table:style-name="ce373" table:formula="of:=IF([.A184]=0;0;([.B184]+[.F18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4]&gt;=[.$C$4];0;IF([.A184]=0;0;(1+[.A184])))" office:value-type="float" office:value="0" calcext:value-type="float">
            <text:p>0</text:p>
          </table:table-cell>
          <table:table-cell table:style-name="ce373" table:formula="of:=IF([.A185]=0;0;(PPMT([.$C$3];[.A185];[.$C$4];-[.$C$2])))" office:value-type="float" office:value="0" calcext:value-type="float">
            <text:p>0.00</text:p>
          </table:table-cell>
          <table:table-cell table:style-name="ce373" table:formula="of:=IF([.A185]=0;0;(IPMT([.$C$3];[.A185];[.$C$4];-[.$C$2])))" office:value-type="float" office:value="0" calcext:value-type="float">
            <text:p>0.00</text:p>
          </table:table-cell>
          <table:table-cell table:style-name="ce373" table:formula="of:=IF([.A185]=0;0;(PMT([.$C$3];[.$C$4];-[.$C$2])))" office:value-type="float" office:value="0" calcext:value-type="float">
            <text:p>0.00</text:p>
          </table:table-cell>
          <table:table-cell table:style-name="ce373" table:formula="of:=IF([.A185]=0;0;([.$C$2]-[.F185]))" office:value-type="float" office:value="0" calcext:value-type="float">
            <text:p>0.00</text:p>
          </table:table-cell>
          <table:table-cell table:style-name="ce373" table:formula="of:=IF([.A185]=0;0;([.B185]+[.F18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5]&gt;=[.$C$4];0;IF([.A185]=0;0;(1+[.A185])))" office:value-type="float" office:value="0" calcext:value-type="float">
            <text:p>0</text:p>
          </table:table-cell>
          <table:table-cell table:style-name="ce373" table:formula="of:=IF([.A186]=0;0;(PPMT([.$C$3];[.A186];[.$C$4];-[.$C$2])))" office:value-type="float" office:value="0" calcext:value-type="float">
            <text:p>0.00</text:p>
          </table:table-cell>
          <table:table-cell table:style-name="ce373" table:formula="of:=IF([.A186]=0;0;(IPMT([.$C$3];[.A186];[.$C$4];-[.$C$2])))" office:value-type="float" office:value="0" calcext:value-type="float">
            <text:p>0.00</text:p>
          </table:table-cell>
          <table:table-cell table:style-name="ce373" table:formula="of:=IF([.A186]=0;0;(PMT([.$C$3];[.$C$4];-[.$C$2])))" office:value-type="float" office:value="0" calcext:value-type="float">
            <text:p>0.00</text:p>
          </table:table-cell>
          <table:table-cell table:style-name="ce373" table:formula="of:=IF([.A186]=0;0;([.$C$2]-[.F186]))" office:value-type="float" office:value="0" calcext:value-type="float">
            <text:p>0.00</text:p>
          </table:table-cell>
          <table:table-cell table:style-name="ce373" table:formula="of:=IF([.A186]=0;0;([.B186]+[.F18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6]&gt;=[.$C$4];0;IF([.A186]=0;0;(1+[.A186])))" office:value-type="float" office:value="0" calcext:value-type="float">
            <text:p>0</text:p>
          </table:table-cell>
          <table:table-cell table:style-name="ce373" table:formula="of:=IF([.A187]=0;0;(PPMT([.$C$3];[.A187];[.$C$4];-[.$C$2])))" office:value-type="float" office:value="0" calcext:value-type="float">
            <text:p>0.00</text:p>
          </table:table-cell>
          <table:table-cell table:style-name="ce373" table:formula="of:=IF([.A187]=0;0;(IPMT([.$C$3];[.A187];[.$C$4];-[.$C$2])))" office:value-type="float" office:value="0" calcext:value-type="float">
            <text:p>0.00</text:p>
          </table:table-cell>
          <table:table-cell table:style-name="ce373" table:formula="of:=IF([.A187]=0;0;(PMT([.$C$3];[.$C$4];-[.$C$2])))" office:value-type="float" office:value="0" calcext:value-type="float">
            <text:p>0.00</text:p>
          </table:table-cell>
          <table:table-cell table:style-name="ce373" table:formula="of:=IF([.A187]=0;0;([.$C$2]-[.F187]))" office:value-type="float" office:value="0" calcext:value-type="float">
            <text:p>0.00</text:p>
          </table:table-cell>
          <table:table-cell table:style-name="ce373" table:formula="of:=IF([.A187]=0;0;([.B187]+[.F18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7]&gt;=[.$C$4];0;IF([.A187]=0;0;(1+[.A187])))" office:value-type="float" office:value="0" calcext:value-type="float">
            <text:p>0</text:p>
          </table:table-cell>
          <table:table-cell table:style-name="ce373" table:formula="of:=IF([.A188]=0;0;(PPMT([.$C$3];[.A188];[.$C$4];-[.$C$2])))" office:value-type="float" office:value="0" calcext:value-type="float">
            <text:p>0.00</text:p>
          </table:table-cell>
          <table:table-cell table:style-name="ce373" table:formula="of:=IF([.A188]=0;0;(IPMT([.$C$3];[.A188];[.$C$4];-[.$C$2])))" office:value-type="float" office:value="0" calcext:value-type="float">
            <text:p>0.00</text:p>
          </table:table-cell>
          <table:table-cell table:style-name="ce373" table:formula="of:=IF([.A188]=0;0;(PMT([.$C$3];[.$C$4];-[.$C$2])))" office:value-type="float" office:value="0" calcext:value-type="float">
            <text:p>0.00</text:p>
          </table:table-cell>
          <table:table-cell table:style-name="ce373" table:formula="of:=IF([.A188]=0;0;([.$C$2]-[.F188]))" office:value-type="float" office:value="0" calcext:value-type="float">
            <text:p>0.00</text:p>
          </table:table-cell>
          <table:table-cell table:style-name="ce373" table:formula="of:=IF([.A188]=0;0;([.B188]+[.F18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8]&gt;=[.$C$4];0;IF([.A188]=0;0;(1+[.A188])))" office:value-type="float" office:value="0" calcext:value-type="float">
            <text:p>0</text:p>
          </table:table-cell>
          <table:table-cell table:style-name="ce373" table:formula="of:=IF([.A189]=0;0;(PPMT([.$C$3];[.A189];[.$C$4];-[.$C$2])))" office:value-type="float" office:value="0" calcext:value-type="float">
            <text:p>0.00</text:p>
          </table:table-cell>
          <table:table-cell table:style-name="ce373" table:formula="of:=IF([.A189]=0;0;(IPMT([.$C$3];[.A189];[.$C$4];-[.$C$2])))" office:value-type="float" office:value="0" calcext:value-type="float">
            <text:p>0.00</text:p>
          </table:table-cell>
          <table:table-cell table:style-name="ce373" table:formula="of:=IF([.A189]=0;0;(PMT([.$C$3];[.$C$4];-[.$C$2])))" office:value-type="float" office:value="0" calcext:value-type="float">
            <text:p>0.00</text:p>
          </table:table-cell>
          <table:table-cell table:style-name="ce373" table:formula="of:=IF([.A189]=0;0;([.$C$2]-[.F189]))" office:value-type="float" office:value="0" calcext:value-type="float">
            <text:p>0.00</text:p>
          </table:table-cell>
          <table:table-cell table:style-name="ce373" table:formula="of:=IF([.A189]=0;0;([.B189]+[.F18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89]&gt;=[.$C$4];0;IF([.A189]=0;0;(1+[.A189])))" office:value-type="float" office:value="0" calcext:value-type="float">
            <text:p>0</text:p>
          </table:table-cell>
          <table:table-cell table:style-name="ce373" table:formula="of:=IF([.A190]=0;0;(PPMT([.$C$3];[.A190];[.$C$4];-[.$C$2])))" office:value-type="float" office:value="0" calcext:value-type="float">
            <text:p>0.00</text:p>
          </table:table-cell>
          <table:table-cell table:style-name="ce373" table:formula="of:=IF([.A190]=0;0;(IPMT([.$C$3];[.A190];[.$C$4];-[.$C$2])))" office:value-type="float" office:value="0" calcext:value-type="float">
            <text:p>0.00</text:p>
          </table:table-cell>
          <table:table-cell table:style-name="ce373" table:formula="of:=IF([.A190]=0;0;(PMT([.$C$3];[.$C$4];-[.$C$2])))" office:value-type="float" office:value="0" calcext:value-type="float">
            <text:p>0.00</text:p>
          </table:table-cell>
          <table:table-cell table:style-name="ce373" table:formula="of:=IF([.A190]=0;0;([.$C$2]-[.F190]))" office:value-type="float" office:value="0" calcext:value-type="float">
            <text:p>0.00</text:p>
          </table:table-cell>
          <table:table-cell table:style-name="ce373" table:formula="of:=IF([.A190]=0;0;([.B190]+[.F18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0]&gt;=[.$C$4];0;IF([.A190]=0;0;(1+[.A190])))" office:value-type="float" office:value="0" calcext:value-type="float">
            <text:p>0</text:p>
          </table:table-cell>
          <table:table-cell table:style-name="ce373" table:formula="of:=IF([.A191]=0;0;(PPMT([.$C$3];[.A191];[.$C$4];-[.$C$2])))" office:value-type="float" office:value="0" calcext:value-type="float">
            <text:p>0.00</text:p>
          </table:table-cell>
          <table:table-cell table:style-name="ce373" table:formula="of:=IF([.A191]=0;0;(IPMT([.$C$3];[.A191];[.$C$4];-[.$C$2])))" office:value-type="float" office:value="0" calcext:value-type="float">
            <text:p>0.00</text:p>
          </table:table-cell>
          <table:table-cell table:style-name="ce373" table:formula="of:=IF([.A191]=0;0;(PMT([.$C$3];[.$C$4];-[.$C$2])))" office:value-type="float" office:value="0" calcext:value-type="float">
            <text:p>0.00</text:p>
          </table:table-cell>
          <table:table-cell table:style-name="ce373" table:formula="of:=IF([.A191]=0;0;([.$C$2]-[.F191]))" office:value-type="float" office:value="0" calcext:value-type="float">
            <text:p>0.00</text:p>
          </table:table-cell>
          <table:table-cell table:style-name="ce373" table:formula="of:=IF([.A191]=0;0;([.B191]+[.F19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1]&gt;=[.$C$4];0;IF([.A191]=0;0;(1+[.A191])))" office:value-type="float" office:value="0" calcext:value-type="float">
            <text:p>0</text:p>
          </table:table-cell>
          <table:table-cell table:style-name="ce373" table:formula="of:=IF([.A192]=0;0;(PPMT([.$C$3];[.A192];[.$C$4];-[.$C$2])))" office:value-type="float" office:value="0" calcext:value-type="float">
            <text:p>0.00</text:p>
          </table:table-cell>
          <table:table-cell table:style-name="ce373" table:formula="of:=IF([.A192]=0;0;(IPMT([.$C$3];[.A192];[.$C$4];-[.$C$2])))" office:value-type="float" office:value="0" calcext:value-type="float">
            <text:p>0.00</text:p>
          </table:table-cell>
          <table:table-cell table:style-name="ce373" table:formula="of:=IF([.A192]=0;0;(PMT([.$C$3];[.$C$4];-[.$C$2])))" office:value-type="float" office:value="0" calcext:value-type="float">
            <text:p>0.00</text:p>
          </table:table-cell>
          <table:table-cell table:style-name="ce373" table:formula="of:=IF([.A192]=0;0;([.$C$2]-[.F192]))" office:value-type="float" office:value="0" calcext:value-type="float">
            <text:p>0.00</text:p>
          </table:table-cell>
          <table:table-cell table:style-name="ce373" table:formula="of:=IF([.A192]=0;0;([.B192]+[.F19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2]&gt;=[.$C$4];0;IF([.A192]=0;0;(1+[.A192])))" office:value-type="float" office:value="0" calcext:value-type="float">
            <text:p>0</text:p>
          </table:table-cell>
          <table:table-cell table:style-name="ce373" table:formula="of:=IF([.A193]=0;0;(PPMT([.$C$3];[.A193];[.$C$4];-[.$C$2])))" office:value-type="float" office:value="0" calcext:value-type="float">
            <text:p>0.00</text:p>
          </table:table-cell>
          <table:table-cell table:style-name="ce373" table:formula="of:=IF([.A193]=0;0;(IPMT([.$C$3];[.A193];[.$C$4];-[.$C$2])))" office:value-type="float" office:value="0" calcext:value-type="float">
            <text:p>0.00</text:p>
          </table:table-cell>
          <table:table-cell table:style-name="ce373" table:formula="of:=IF([.A193]=0;0;(PMT([.$C$3];[.$C$4];-[.$C$2])))" office:value-type="float" office:value="0" calcext:value-type="float">
            <text:p>0.00</text:p>
          </table:table-cell>
          <table:table-cell table:style-name="ce373" table:formula="of:=IF([.A193]=0;0;([.$C$2]-[.F193]))" office:value-type="float" office:value="0" calcext:value-type="float">
            <text:p>0.00</text:p>
          </table:table-cell>
          <table:table-cell table:style-name="ce373" table:formula="of:=IF([.A193]=0;0;([.B193]+[.F19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3]&gt;=[.$C$4];0;IF([.A193]=0;0;(1+[.A193])))" office:value-type="float" office:value="0" calcext:value-type="float">
            <text:p>0</text:p>
          </table:table-cell>
          <table:table-cell table:style-name="ce373" table:formula="of:=IF([.A194]=0;0;(PPMT([.$C$3];[.A194];[.$C$4];-[.$C$2])))" office:value-type="float" office:value="0" calcext:value-type="float">
            <text:p>0.00</text:p>
          </table:table-cell>
          <table:table-cell table:style-name="ce373" table:formula="of:=IF([.A194]=0;0;(IPMT([.$C$3];[.A194];[.$C$4];-[.$C$2])))" office:value-type="float" office:value="0" calcext:value-type="float">
            <text:p>0.00</text:p>
          </table:table-cell>
          <table:table-cell table:style-name="ce373" table:formula="of:=IF([.A194]=0;0;(PMT([.$C$3];[.$C$4];-[.$C$2])))" office:value-type="float" office:value="0" calcext:value-type="float">
            <text:p>0.00</text:p>
          </table:table-cell>
          <table:table-cell table:style-name="ce373" table:formula="of:=IF([.A194]=0;0;([.$C$2]-[.F194]))" office:value-type="float" office:value="0" calcext:value-type="float">
            <text:p>0.00</text:p>
          </table:table-cell>
          <table:table-cell table:style-name="ce373" table:formula="of:=IF([.A194]=0;0;([.B194]+[.F19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4]&gt;=[.$C$4];0;IF([.A194]=0;0;(1+[.A194])))" office:value-type="float" office:value="0" calcext:value-type="float">
            <text:p>0</text:p>
          </table:table-cell>
          <table:table-cell table:style-name="ce373" table:formula="of:=IF([.A195]=0;0;(PPMT([.$C$3];[.A195];[.$C$4];-[.$C$2])))" office:value-type="float" office:value="0" calcext:value-type="float">
            <text:p>0.00</text:p>
          </table:table-cell>
          <table:table-cell table:style-name="ce373" table:formula="of:=IF([.A195]=0;0;(IPMT([.$C$3];[.A195];[.$C$4];-[.$C$2])))" office:value-type="float" office:value="0" calcext:value-type="float">
            <text:p>0.00</text:p>
          </table:table-cell>
          <table:table-cell table:style-name="ce373" table:formula="of:=IF([.A195]=0;0;(PMT([.$C$3];[.$C$4];-[.$C$2])))" office:value-type="float" office:value="0" calcext:value-type="float">
            <text:p>0.00</text:p>
          </table:table-cell>
          <table:table-cell table:style-name="ce373" table:formula="of:=IF([.A195]=0;0;([.$C$2]-[.F195]))" office:value-type="float" office:value="0" calcext:value-type="float">
            <text:p>0.00</text:p>
          </table:table-cell>
          <table:table-cell table:style-name="ce373" table:formula="of:=IF([.A195]=0;0;([.B195]+[.F19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5]&gt;=[.$C$4];0;IF([.A195]=0;0;(1+[.A195])))" office:value-type="float" office:value="0" calcext:value-type="float">
            <text:p>0</text:p>
          </table:table-cell>
          <table:table-cell table:style-name="ce373" table:formula="of:=IF([.A196]=0;0;(PPMT([.$C$3];[.A196];[.$C$4];-[.$C$2])))" office:value-type="float" office:value="0" calcext:value-type="float">
            <text:p>0.00</text:p>
          </table:table-cell>
          <table:table-cell table:style-name="ce373" table:formula="of:=IF([.A196]=0;0;(IPMT([.$C$3];[.A196];[.$C$4];-[.$C$2])))" office:value-type="float" office:value="0" calcext:value-type="float">
            <text:p>0.00</text:p>
          </table:table-cell>
          <table:table-cell table:style-name="ce373" table:formula="of:=IF([.A196]=0;0;(PMT([.$C$3];[.$C$4];-[.$C$2])))" office:value-type="float" office:value="0" calcext:value-type="float">
            <text:p>0.00</text:p>
          </table:table-cell>
          <table:table-cell table:style-name="ce373" table:formula="of:=IF([.A196]=0;0;([.$C$2]-[.F196]))" office:value-type="float" office:value="0" calcext:value-type="float">
            <text:p>0.00</text:p>
          </table:table-cell>
          <table:table-cell table:style-name="ce373" table:formula="of:=IF([.A196]=0;0;([.B196]+[.F19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6]&gt;=[.$C$4];0;IF([.A196]=0;0;(1+[.A196])))" office:value-type="float" office:value="0" calcext:value-type="float">
            <text:p>0</text:p>
          </table:table-cell>
          <table:table-cell table:style-name="ce373" table:formula="of:=IF([.A197]=0;0;(PPMT([.$C$3];[.A197];[.$C$4];-[.$C$2])))" office:value-type="float" office:value="0" calcext:value-type="float">
            <text:p>0.00</text:p>
          </table:table-cell>
          <table:table-cell table:style-name="ce373" table:formula="of:=IF([.A197]=0;0;(IPMT([.$C$3];[.A197];[.$C$4];-[.$C$2])))" office:value-type="float" office:value="0" calcext:value-type="float">
            <text:p>0.00</text:p>
          </table:table-cell>
          <table:table-cell table:style-name="ce373" table:formula="of:=IF([.A197]=0;0;(PMT([.$C$3];[.$C$4];-[.$C$2])))" office:value-type="float" office:value="0" calcext:value-type="float">
            <text:p>0.00</text:p>
          </table:table-cell>
          <table:table-cell table:style-name="ce373" table:formula="of:=IF([.A197]=0;0;([.$C$2]-[.F197]))" office:value-type="float" office:value="0" calcext:value-type="float">
            <text:p>0.00</text:p>
          </table:table-cell>
          <table:table-cell table:style-name="ce373" table:formula="of:=IF([.A197]=0;0;([.B197]+[.F19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7]&gt;=[.$C$4];0;IF([.A197]=0;0;(1+[.A197])))" office:value-type="float" office:value="0" calcext:value-type="float">
            <text:p>0</text:p>
          </table:table-cell>
          <table:table-cell table:style-name="ce373" table:formula="of:=IF([.A198]=0;0;(PPMT([.$C$3];[.A198];[.$C$4];-[.$C$2])))" office:value-type="float" office:value="0" calcext:value-type="float">
            <text:p>0.00</text:p>
          </table:table-cell>
          <table:table-cell table:style-name="ce373" table:formula="of:=IF([.A198]=0;0;(IPMT([.$C$3];[.A198];[.$C$4];-[.$C$2])))" office:value-type="float" office:value="0" calcext:value-type="float">
            <text:p>0.00</text:p>
          </table:table-cell>
          <table:table-cell table:style-name="ce373" table:formula="of:=IF([.A198]=0;0;(PMT([.$C$3];[.$C$4];-[.$C$2])))" office:value-type="float" office:value="0" calcext:value-type="float">
            <text:p>0.00</text:p>
          </table:table-cell>
          <table:table-cell table:style-name="ce373" table:formula="of:=IF([.A198]=0;0;([.$C$2]-[.F198]))" office:value-type="float" office:value="0" calcext:value-type="float">
            <text:p>0.00</text:p>
          </table:table-cell>
          <table:table-cell table:style-name="ce373" table:formula="of:=IF([.A198]=0;0;([.B198]+[.F19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8]&gt;=[.$C$4];0;IF([.A198]=0;0;(1+[.A198])))" office:value-type="float" office:value="0" calcext:value-type="float">
            <text:p>0</text:p>
          </table:table-cell>
          <table:table-cell table:style-name="ce373" table:formula="of:=IF([.A199]=0;0;(PPMT([.$C$3];[.A199];[.$C$4];-[.$C$2])))" office:value-type="float" office:value="0" calcext:value-type="float">
            <text:p>0.00</text:p>
          </table:table-cell>
          <table:table-cell table:style-name="ce373" table:formula="of:=IF([.A199]=0;0;(IPMT([.$C$3];[.A199];[.$C$4];-[.$C$2])))" office:value-type="float" office:value="0" calcext:value-type="float">
            <text:p>0.00</text:p>
          </table:table-cell>
          <table:table-cell table:style-name="ce373" table:formula="of:=IF([.A199]=0;0;(PMT([.$C$3];[.$C$4];-[.$C$2])))" office:value-type="float" office:value="0" calcext:value-type="float">
            <text:p>0.00</text:p>
          </table:table-cell>
          <table:table-cell table:style-name="ce373" table:formula="of:=IF([.A199]=0;0;([.$C$2]-[.F199]))" office:value-type="float" office:value="0" calcext:value-type="float">
            <text:p>0.00</text:p>
          </table:table-cell>
          <table:table-cell table:style-name="ce373" table:formula="of:=IF([.A199]=0;0;([.B199]+[.F19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199]&gt;=[.$C$4];0;IF([.A199]=0;0;(1+[.A199])))" office:value-type="float" office:value="0" calcext:value-type="float">
            <text:p>0</text:p>
          </table:table-cell>
          <table:table-cell table:style-name="ce373" table:formula="of:=IF([.A200]=0;0;(PPMT([.$C$3];[.A200];[.$C$4];-[.$C$2])))" office:value-type="float" office:value="0" calcext:value-type="float">
            <text:p>0.00</text:p>
          </table:table-cell>
          <table:table-cell table:style-name="ce373" table:formula="of:=IF([.A200]=0;0;(IPMT([.$C$3];[.A200];[.$C$4];-[.$C$2])))" office:value-type="float" office:value="0" calcext:value-type="float">
            <text:p>0.00</text:p>
          </table:table-cell>
          <table:table-cell table:style-name="ce373" table:formula="of:=IF([.A200]=0;0;(PMT([.$C$3];[.$C$4];-[.$C$2])))" office:value-type="float" office:value="0" calcext:value-type="float">
            <text:p>0.00</text:p>
          </table:table-cell>
          <table:table-cell table:style-name="ce373" table:formula="of:=IF([.A200]=0;0;([.$C$2]-[.F200]))" office:value-type="float" office:value="0" calcext:value-type="float">
            <text:p>0.00</text:p>
          </table:table-cell>
          <table:table-cell table:style-name="ce373" table:formula="of:=IF([.A200]=0;0;([.B200]+[.F19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0]&gt;=[.$C$4];0;IF([.A200]=0;0;(1+[.A200])))" office:value-type="float" office:value="0" calcext:value-type="float">
            <text:p>0</text:p>
          </table:table-cell>
          <table:table-cell table:style-name="ce373" table:formula="of:=IF([.A201]=0;0;(PPMT([.$C$3];[.A201];[.$C$4];-[.$C$2])))" office:value-type="float" office:value="0" calcext:value-type="float">
            <text:p>0.00</text:p>
          </table:table-cell>
          <table:table-cell table:style-name="ce373" table:formula="of:=IF([.A201]=0;0;(IPMT([.$C$3];[.A201];[.$C$4];-[.$C$2])))" office:value-type="float" office:value="0" calcext:value-type="float">
            <text:p>0.00</text:p>
          </table:table-cell>
          <table:table-cell table:style-name="ce373" table:formula="of:=IF([.A201]=0;0;(PMT([.$C$3];[.$C$4];-[.$C$2])))" office:value-type="float" office:value="0" calcext:value-type="float">
            <text:p>0.00</text:p>
          </table:table-cell>
          <table:table-cell table:style-name="ce373" table:formula="of:=IF([.A201]=0;0;([.$C$2]-[.F201]))" office:value-type="float" office:value="0" calcext:value-type="float">
            <text:p>0.00</text:p>
          </table:table-cell>
          <table:table-cell table:style-name="ce373" table:formula="of:=IF([.A201]=0;0;([.B201]+[.F20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1]&gt;=[.$C$4];0;IF([.A201]=0;0;(1+[.A201])))" office:value-type="float" office:value="0" calcext:value-type="float">
            <text:p>0</text:p>
          </table:table-cell>
          <table:table-cell table:style-name="ce373" table:formula="of:=IF([.A202]=0;0;(PPMT([.$C$3];[.A202];[.$C$4];-[.$C$2])))" office:value-type="float" office:value="0" calcext:value-type="float">
            <text:p>0.00</text:p>
          </table:table-cell>
          <table:table-cell table:style-name="ce373" table:formula="of:=IF([.A202]=0;0;(IPMT([.$C$3];[.A202];[.$C$4];-[.$C$2])))" office:value-type="float" office:value="0" calcext:value-type="float">
            <text:p>0.00</text:p>
          </table:table-cell>
          <table:table-cell table:style-name="ce373" table:formula="of:=IF([.A202]=0;0;(PMT([.$C$3];[.$C$4];-[.$C$2])))" office:value-type="float" office:value="0" calcext:value-type="float">
            <text:p>0.00</text:p>
          </table:table-cell>
          <table:table-cell table:style-name="ce373" table:formula="of:=IF([.A202]=0;0;([.$C$2]-[.F202]))" office:value-type="float" office:value="0" calcext:value-type="float">
            <text:p>0.00</text:p>
          </table:table-cell>
          <table:table-cell table:style-name="ce373" table:formula="of:=IF([.A202]=0;0;([.B202]+[.F20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2]&gt;=[.$C$4];0;IF([.A202]=0;0;(1+[.A202])))" office:value-type="float" office:value="0" calcext:value-type="float">
            <text:p>0</text:p>
          </table:table-cell>
          <table:table-cell table:style-name="ce373" table:formula="of:=IF([.A203]=0;0;(PPMT([.$C$3];[.A203];[.$C$4];-[.$C$2])))" office:value-type="float" office:value="0" calcext:value-type="float">
            <text:p>0.00</text:p>
          </table:table-cell>
          <table:table-cell table:style-name="ce373" table:formula="of:=IF([.A203]=0;0;(IPMT([.$C$3];[.A203];[.$C$4];-[.$C$2])))" office:value-type="float" office:value="0" calcext:value-type="float">
            <text:p>0.00</text:p>
          </table:table-cell>
          <table:table-cell table:style-name="ce373" table:formula="of:=IF([.A203]=0;0;(PMT([.$C$3];[.$C$4];-[.$C$2])))" office:value-type="float" office:value="0" calcext:value-type="float">
            <text:p>0.00</text:p>
          </table:table-cell>
          <table:table-cell table:style-name="ce373" table:formula="of:=IF([.A203]=0;0;([.$C$2]-[.F203]))" office:value-type="float" office:value="0" calcext:value-type="float">
            <text:p>0.00</text:p>
          </table:table-cell>
          <table:table-cell table:style-name="ce373" table:formula="of:=IF([.A203]=0;0;([.B203]+[.F20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3]&gt;=[.$C$4];0;IF([.A203]=0;0;(1+[.A203])))" office:value-type="float" office:value="0" calcext:value-type="float">
            <text:p>0</text:p>
          </table:table-cell>
          <table:table-cell table:style-name="ce373" table:formula="of:=IF([.A204]=0;0;(PPMT([.$C$3];[.A204];[.$C$4];-[.$C$2])))" office:value-type="float" office:value="0" calcext:value-type="float">
            <text:p>0.00</text:p>
          </table:table-cell>
          <table:table-cell table:style-name="ce373" table:formula="of:=IF([.A204]=0;0;(IPMT([.$C$3];[.A204];[.$C$4];-[.$C$2])))" office:value-type="float" office:value="0" calcext:value-type="float">
            <text:p>0.00</text:p>
          </table:table-cell>
          <table:table-cell table:style-name="ce373" table:formula="of:=IF([.A204]=0;0;(PMT([.$C$3];[.$C$4];-[.$C$2])))" office:value-type="float" office:value="0" calcext:value-type="float">
            <text:p>0.00</text:p>
          </table:table-cell>
          <table:table-cell table:style-name="ce373" table:formula="of:=IF([.A204]=0;0;([.$C$2]-[.F204]))" office:value-type="float" office:value="0" calcext:value-type="float">
            <text:p>0.00</text:p>
          </table:table-cell>
          <table:table-cell table:style-name="ce373" table:formula="of:=IF([.A204]=0;0;([.B204]+[.F20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4]&gt;=[.$C$4];0;IF([.A204]=0;0;(1+[.A204])))" office:value-type="float" office:value="0" calcext:value-type="float">
            <text:p>0</text:p>
          </table:table-cell>
          <table:table-cell table:style-name="ce373" table:formula="of:=IF([.A205]=0;0;(PPMT([.$C$3];[.A205];[.$C$4];-[.$C$2])))" office:value-type="float" office:value="0" calcext:value-type="float">
            <text:p>0.00</text:p>
          </table:table-cell>
          <table:table-cell table:style-name="ce373" table:formula="of:=IF([.A205]=0;0;(IPMT([.$C$3];[.A205];[.$C$4];-[.$C$2])))" office:value-type="float" office:value="0" calcext:value-type="float">
            <text:p>0.00</text:p>
          </table:table-cell>
          <table:table-cell table:style-name="ce373" table:formula="of:=IF([.A205]=0;0;(PMT([.$C$3];[.$C$4];-[.$C$2])))" office:value-type="float" office:value="0" calcext:value-type="float">
            <text:p>0.00</text:p>
          </table:table-cell>
          <table:table-cell table:style-name="ce373" table:formula="of:=IF([.A205]=0;0;([.$C$2]-[.F205]))" office:value-type="float" office:value="0" calcext:value-type="float">
            <text:p>0.00</text:p>
          </table:table-cell>
          <table:table-cell table:style-name="ce373" table:formula="of:=IF([.A205]=0;0;([.B205]+[.F20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5]&gt;=[.$C$4];0;IF([.A205]=0;0;(1+[.A205])))" office:value-type="float" office:value="0" calcext:value-type="float">
            <text:p>0</text:p>
          </table:table-cell>
          <table:table-cell table:style-name="ce373" table:formula="of:=IF([.A206]=0;0;(PPMT([.$C$3];[.A206];[.$C$4];-[.$C$2])))" office:value-type="float" office:value="0" calcext:value-type="float">
            <text:p>0.00</text:p>
          </table:table-cell>
          <table:table-cell table:style-name="ce373" table:formula="of:=IF([.A206]=0;0;(IPMT([.$C$3];[.A206];[.$C$4];-[.$C$2])))" office:value-type="float" office:value="0" calcext:value-type="float">
            <text:p>0.00</text:p>
          </table:table-cell>
          <table:table-cell table:style-name="ce373" table:formula="of:=IF([.A206]=0;0;(PMT([.$C$3];[.$C$4];-[.$C$2])))" office:value-type="float" office:value="0" calcext:value-type="float">
            <text:p>0.00</text:p>
          </table:table-cell>
          <table:table-cell table:style-name="ce373" table:formula="of:=IF([.A206]=0;0;([.$C$2]-[.F206]))" office:value-type="float" office:value="0" calcext:value-type="float">
            <text:p>0.00</text:p>
          </table:table-cell>
          <table:table-cell table:style-name="ce373" table:formula="of:=IF([.A206]=0;0;([.B206]+[.F20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6]&gt;=[.$C$4];0;IF([.A206]=0;0;(1+[.A206])))" office:value-type="float" office:value="0" calcext:value-type="float">
            <text:p>0</text:p>
          </table:table-cell>
          <table:table-cell table:style-name="ce373" table:formula="of:=IF([.A207]=0;0;(PPMT([.$C$3];[.A207];[.$C$4];-[.$C$2])))" office:value-type="float" office:value="0" calcext:value-type="float">
            <text:p>0.00</text:p>
          </table:table-cell>
          <table:table-cell table:style-name="ce373" table:formula="of:=IF([.A207]=0;0;(IPMT([.$C$3];[.A207];[.$C$4];-[.$C$2])))" office:value-type="float" office:value="0" calcext:value-type="float">
            <text:p>0.00</text:p>
          </table:table-cell>
          <table:table-cell table:style-name="ce373" table:formula="of:=IF([.A207]=0;0;(PMT([.$C$3];[.$C$4];-[.$C$2])))" office:value-type="float" office:value="0" calcext:value-type="float">
            <text:p>0.00</text:p>
          </table:table-cell>
          <table:table-cell table:style-name="ce373" table:formula="of:=IF([.A207]=0;0;([.$C$2]-[.F207]))" office:value-type="float" office:value="0" calcext:value-type="float">
            <text:p>0.00</text:p>
          </table:table-cell>
          <table:table-cell table:style-name="ce373" table:formula="of:=IF([.A207]=0;0;([.B207]+[.F20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7]&gt;=[.$C$4];0;IF([.A207]=0;0;(1+[.A207])))" office:value-type="float" office:value="0" calcext:value-type="float">
            <text:p>0</text:p>
          </table:table-cell>
          <table:table-cell table:style-name="ce373" table:formula="of:=IF([.A208]=0;0;(PPMT([.$C$3];[.A208];[.$C$4];-[.$C$2])))" office:value-type="float" office:value="0" calcext:value-type="float">
            <text:p>0.00</text:p>
          </table:table-cell>
          <table:table-cell table:style-name="ce373" table:formula="of:=IF([.A208]=0;0;(IPMT([.$C$3];[.A208];[.$C$4];-[.$C$2])))" office:value-type="float" office:value="0" calcext:value-type="float">
            <text:p>0.00</text:p>
          </table:table-cell>
          <table:table-cell table:style-name="ce373" table:formula="of:=IF([.A208]=0;0;(PMT([.$C$3];[.$C$4];-[.$C$2])))" office:value-type="float" office:value="0" calcext:value-type="float">
            <text:p>0.00</text:p>
          </table:table-cell>
          <table:table-cell table:style-name="ce373" table:formula="of:=IF([.A208]=0;0;([.$C$2]-[.F208]))" office:value-type="float" office:value="0" calcext:value-type="float">
            <text:p>0.00</text:p>
          </table:table-cell>
          <table:table-cell table:style-name="ce373" table:formula="of:=IF([.A208]=0;0;([.B208]+[.F20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8]&gt;=[.$C$4];0;IF([.A208]=0;0;(1+[.A208])))" office:value-type="float" office:value="0" calcext:value-type="float">
            <text:p>0</text:p>
          </table:table-cell>
          <table:table-cell table:style-name="ce373" table:formula="of:=IF([.A209]=0;0;(PPMT([.$C$3];[.A209];[.$C$4];-[.$C$2])))" office:value-type="float" office:value="0" calcext:value-type="float">
            <text:p>0.00</text:p>
          </table:table-cell>
          <table:table-cell table:style-name="ce373" table:formula="of:=IF([.A209]=0;0;(IPMT([.$C$3];[.A209];[.$C$4];-[.$C$2])))" office:value-type="float" office:value="0" calcext:value-type="float">
            <text:p>0.00</text:p>
          </table:table-cell>
          <table:table-cell table:style-name="ce373" table:formula="of:=IF([.A209]=0;0;(PMT([.$C$3];[.$C$4];-[.$C$2])))" office:value-type="float" office:value="0" calcext:value-type="float">
            <text:p>0.00</text:p>
          </table:table-cell>
          <table:table-cell table:style-name="ce373" table:formula="of:=IF([.A209]=0;0;([.$C$2]-[.F209]))" office:value-type="float" office:value="0" calcext:value-type="float">
            <text:p>0.00</text:p>
          </table:table-cell>
          <table:table-cell table:style-name="ce373" table:formula="of:=IF([.A209]=0;0;([.B209]+[.F20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09]&gt;=[.$C$4];0;IF([.A209]=0;0;(1+[.A209])))" office:value-type="float" office:value="0" calcext:value-type="float">
            <text:p>0</text:p>
          </table:table-cell>
          <table:table-cell table:style-name="ce373" table:formula="of:=IF([.A210]=0;0;(PPMT([.$C$3];[.A210];[.$C$4];-[.$C$2])))" office:value-type="float" office:value="0" calcext:value-type="float">
            <text:p>0.00</text:p>
          </table:table-cell>
          <table:table-cell table:style-name="ce373" table:formula="of:=IF([.A210]=0;0;(IPMT([.$C$3];[.A210];[.$C$4];-[.$C$2])))" office:value-type="float" office:value="0" calcext:value-type="float">
            <text:p>0.00</text:p>
          </table:table-cell>
          <table:table-cell table:style-name="ce373" table:formula="of:=IF([.A210]=0;0;(PMT([.$C$3];[.$C$4];-[.$C$2])))" office:value-type="float" office:value="0" calcext:value-type="float">
            <text:p>0.00</text:p>
          </table:table-cell>
          <table:table-cell table:style-name="ce373" table:formula="of:=IF([.A210]=0;0;([.$C$2]-[.F210]))" office:value-type="float" office:value="0" calcext:value-type="float">
            <text:p>0.00</text:p>
          </table:table-cell>
          <table:table-cell table:style-name="ce373" table:formula="of:=IF([.A210]=0;0;([.B210]+[.F20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0]&gt;=[.$C$4];0;IF([.A210]=0;0;(1+[.A210])))" office:value-type="float" office:value="0" calcext:value-type="float">
            <text:p>0</text:p>
          </table:table-cell>
          <table:table-cell table:style-name="ce373" table:formula="of:=IF([.A211]=0;0;(PPMT([.$C$3];[.A211];[.$C$4];-[.$C$2])))" office:value-type="float" office:value="0" calcext:value-type="float">
            <text:p>0.00</text:p>
          </table:table-cell>
          <table:table-cell table:style-name="ce373" table:formula="of:=IF([.A211]=0;0;(IPMT([.$C$3];[.A211];[.$C$4];-[.$C$2])))" office:value-type="float" office:value="0" calcext:value-type="float">
            <text:p>0.00</text:p>
          </table:table-cell>
          <table:table-cell table:style-name="ce373" table:formula="of:=IF([.A211]=0;0;(PMT([.$C$3];[.$C$4];-[.$C$2])))" office:value-type="float" office:value="0" calcext:value-type="float">
            <text:p>0.00</text:p>
          </table:table-cell>
          <table:table-cell table:style-name="ce373" table:formula="of:=IF([.A211]=0;0;([.$C$2]-[.F211]))" office:value-type="float" office:value="0" calcext:value-type="float">
            <text:p>0.00</text:p>
          </table:table-cell>
          <table:table-cell table:style-name="ce373" table:formula="of:=IF([.A211]=0;0;([.B211]+[.F21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1]&gt;=[.$C$4];0;IF([.A211]=0;0;(1+[.A211])))" office:value-type="float" office:value="0" calcext:value-type="float">
            <text:p>0</text:p>
          </table:table-cell>
          <table:table-cell table:style-name="ce373" table:formula="of:=IF([.A212]=0;0;(PPMT([.$C$3];[.A212];[.$C$4];-[.$C$2])))" office:value-type="float" office:value="0" calcext:value-type="float">
            <text:p>0.00</text:p>
          </table:table-cell>
          <table:table-cell table:style-name="ce373" table:formula="of:=IF([.A212]=0;0;(IPMT([.$C$3];[.A212];[.$C$4];-[.$C$2])))" office:value-type="float" office:value="0" calcext:value-type="float">
            <text:p>0.00</text:p>
          </table:table-cell>
          <table:table-cell table:style-name="ce373" table:formula="of:=IF([.A212]=0;0;(PMT([.$C$3];[.$C$4];-[.$C$2])))" office:value-type="float" office:value="0" calcext:value-type="float">
            <text:p>0.00</text:p>
          </table:table-cell>
          <table:table-cell table:style-name="ce373" table:formula="of:=IF([.A212]=0;0;([.$C$2]-[.F212]))" office:value-type="float" office:value="0" calcext:value-type="float">
            <text:p>0.00</text:p>
          </table:table-cell>
          <table:table-cell table:style-name="ce373" table:formula="of:=IF([.A212]=0;0;([.B212]+[.F21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2]&gt;=[.$C$4];0;IF([.A212]=0;0;(1+[.A212])))" office:value-type="float" office:value="0" calcext:value-type="float">
            <text:p>0</text:p>
          </table:table-cell>
          <table:table-cell table:style-name="ce373" table:formula="of:=IF([.A213]=0;0;(PPMT([.$C$3];[.A213];[.$C$4];-[.$C$2])))" office:value-type="float" office:value="0" calcext:value-type="float">
            <text:p>0.00</text:p>
          </table:table-cell>
          <table:table-cell table:style-name="ce373" table:formula="of:=IF([.A213]=0;0;(IPMT([.$C$3];[.A213];[.$C$4];-[.$C$2])))" office:value-type="float" office:value="0" calcext:value-type="float">
            <text:p>0.00</text:p>
          </table:table-cell>
          <table:table-cell table:style-name="ce373" table:formula="of:=IF([.A213]=0;0;(PMT([.$C$3];[.$C$4];-[.$C$2])))" office:value-type="float" office:value="0" calcext:value-type="float">
            <text:p>0.00</text:p>
          </table:table-cell>
          <table:table-cell table:style-name="ce373" table:formula="of:=IF([.A213]=0;0;([.$C$2]-[.F213]))" office:value-type="float" office:value="0" calcext:value-type="float">
            <text:p>0.00</text:p>
          </table:table-cell>
          <table:table-cell table:style-name="ce373" table:formula="of:=IF([.A213]=0;0;([.B213]+[.F21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3]&gt;=[.$C$4];0;IF([.A213]=0;0;(1+[.A213])))" office:value-type="float" office:value="0" calcext:value-type="float">
            <text:p>0</text:p>
          </table:table-cell>
          <table:table-cell table:style-name="ce373" table:formula="of:=IF([.A214]=0;0;(PPMT([.$C$3];[.A214];[.$C$4];-[.$C$2])))" office:value-type="float" office:value="0" calcext:value-type="float">
            <text:p>0.00</text:p>
          </table:table-cell>
          <table:table-cell table:style-name="ce373" table:formula="of:=IF([.A214]=0;0;(IPMT([.$C$3];[.A214];[.$C$4];-[.$C$2])))" office:value-type="float" office:value="0" calcext:value-type="float">
            <text:p>0.00</text:p>
          </table:table-cell>
          <table:table-cell table:style-name="ce373" table:formula="of:=IF([.A214]=0;0;(PMT([.$C$3];[.$C$4];-[.$C$2])))" office:value-type="float" office:value="0" calcext:value-type="float">
            <text:p>0.00</text:p>
          </table:table-cell>
          <table:table-cell table:style-name="ce373" table:formula="of:=IF([.A214]=0;0;([.$C$2]-[.F214]))" office:value-type="float" office:value="0" calcext:value-type="float">
            <text:p>0.00</text:p>
          </table:table-cell>
          <table:table-cell table:style-name="ce373" table:formula="of:=IF([.A214]=0;0;([.B214]+[.F21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4]&gt;=[.$C$4];0;IF([.A214]=0;0;(1+[.A214])))" office:value-type="float" office:value="0" calcext:value-type="float">
            <text:p>0</text:p>
          </table:table-cell>
          <table:table-cell table:style-name="ce373" table:formula="of:=IF([.A215]=0;0;(PPMT([.$C$3];[.A215];[.$C$4];-[.$C$2])))" office:value-type="float" office:value="0" calcext:value-type="float">
            <text:p>0.00</text:p>
          </table:table-cell>
          <table:table-cell table:style-name="ce373" table:formula="of:=IF([.A215]=0;0;(IPMT([.$C$3];[.A215];[.$C$4];-[.$C$2])))" office:value-type="float" office:value="0" calcext:value-type="float">
            <text:p>0.00</text:p>
          </table:table-cell>
          <table:table-cell table:style-name="ce373" table:formula="of:=IF([.A215]=0;0;(PMT([.$C$3];[.$C$4];-[.$C$2])))" office:value-type="float" office:value="0" calcext:value-type="float">
            <text:p>0.00</text:p>
          </table:table-cell>
          <table:table-cell table:style-name="ce373" table:formula="of:=IF([.A215]=0;0;([.$C$2]-[.F215]))" office:value-type="float" office:value="0" calcext:value-type="float">
            <text:p>0.00</text:p>
          </table:table-cell>
          <table:table-cell table:style-name="ce373" table:formula="of:=IF([.A215]=0;0;([.B215]+[.F21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5]&gt;=[.$C$4];0;IF([.A215]=0;0;(1+[.A215])))" office:value-type="float" office:value="0" calcext:value-type="float">
            <text:p>0</text:p>
          </table:table-cell>
          <table:table-cell table:style-name="ce373" table:formula="of:=IF([.A216]=0;0;(PPMT([.$C$3];[.A216];[.$C$4];-[.$C$2])))" office:value-type="float" office:value="0" calcext:value-type="float">
            <text:p>0.00</text:p>
          </table:table-cell>
          <table:table-cell table:style-name="ce373" table:formula="of:=IF([.A216]=0;0;(IPMT([.$C$3];[.A216];[.$C$4];-[.$C$2])))" office:value-type="float" office:value="0" calcext:value-type="float">
            <text:p>0.00</text:p>
          </table:table-cell>
          <table:table-cell table:style-name="ce373" table:formula="of:=IF([.A216]=0;0;(PMT([.$C$3];[.$C$4];-[.$C$2])))" office:value-type="float" office:value="0" calcext:value-type="float">
            <text:p>0.00</text:p>
          </table:table-cell>
          <table:table-cell table:style-name="ce373" table:formula="of:=IF([.A216]=0;0;([.$C$2]-[.F216]))" office:value-type="float" office:value="0" calcext:value-type="float">
            <text:p>0.00</text:p>
          </table:table-cell>
          <table:table-cell table:style-name="ce373" table:formula="of:=IF([.A216]=0;0;([.B216]+[.F21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6]&gt;=[.$C$4];0;IF([.A216]=0;0;(1+[.A216])))" office:value-type="float" office:value="0" calcext:value-type="float">
            <text:p>0</text:p>
          </table:table-cell>
          <table:table-cell table:style-name="ce373" table:formula="of:=IF([.A217]=0;0;(PPMT([.$C$3];[.A217];[.$C$4];-[.$C$2])))" office:value-type="float" office:value="0" calcext:value-type="float">
            <text:p>0.00</text:p>
          </table:table-cell>
          <table:table-cell table:style-name="ce373" table:formula="of:=IF([.A217]=0;0;(IPMT([.$C$3];[.A217];[.$C$4];-[.$C$2])))" office:value-type="float" office:value="0" calcext:value-type="float">
            <text:p>0.00</text:p>
          </table:table-cell>
          <table:table-cell table:style-name="ce373" table:formula="of:=IF([.A217]=0;0;(PMT([.$C$3];[.$C$4];-[.$C$2])))" office:value-type="float" office:value="0" calcext:value-type="float">
            <text:p>0.00</text:p>
          </table:table-cell>
          <table:table-cell table:style-name="ce373" table:formula="of:=IF([.A217]=0;0;([.$C$2]-[.F217]))" office:value-type="float" office:value="0" calcext:value-type="float">
            <text:p>0.00</text:p>
          </table:table-cell>
          <table:table-cell table:style-name="ce373" table:formula="of:=IF([.A217]=0;0;([.B217]+[.F21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7]&gt;=[.$C$4];0;IF([.A217]=0;0;(1+[.A217])))" office:value-type="float" office:value="0" calcext:value-type="float">
            <text:p>0</text:p>
          </table:table-cell>
          <table:table-cell table:style-name="ce373" table:formula="of:=IF([.A218]=0;0;(PPMT([.$C$3];[.A218];[.$C$4];-[.$C$2])))" office:value-type="float" office:value="0" calcext:value-type="float">
            <text:p>0.00</text:p>
          </table:table-cell>
          <table:table-cell table:style-name="ce373" table:formula="of:=IF([.A218]=0;0;(IPMT([.$C$3];[.A218];[.$C$4];-[.$C$2])))" office:value-type="float" office:value="0" calcext:value-type="float">
            <text:p>0.00</text:p>
          </table:table-cell>
          <table:table-cell table:style-name="ce373" table:formula="of:=IF([.A218]=0;0;(PMT([.$C$3];[.$C$4];-[.$C$2])))" office:value-type="float" office:value="0" calcext:value-type="float">
            <text:p>0.00</text:p>
          </table:table-cell>
          <table:table-cell table:style-name="ce373" table:formula="of:=IF([.A218]=0;0;([.$C$2]-[.F218]))" office:value-type="float" office:value="0" calcext:value-type="float">
            <text:p>0.00</text:p>
          </table:table-cell>
          <table:table-cell table:style-name="ce373" table:formula="of:=IF([.A218]=0;0;([.B218]+[.F21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8]&gt;=[.$C$4];0;IF([.A218]=0;0;(1+[.A218])))" office:value-type="float" office:value="0" calcext:value-type="float">
            <text:p>0</text:p>
          </table:table-cell>
          <table:table-cell table:style-name="ce373" table:formula="of:=IF([.A219]=0;0;(PPMT([.$C$3];[.A219];[.$C$4];-[.$C$2])))" office:value-type="float" office:value="0" calcext:value-type="float">
            <text:p>0.00</text:p>
          </table:table-cell>
          <table:table-cell table:style-name="ce373" table:formula="of:=IF([.A219]=0;0;(IPMT([.$C$3];[.A219];[.$C$4];-[.$C$2])))" office:value-type="float" office:value="0" calcext:value-type="float">
            <text:p>0.00</text:p>
          </table:table-cell>
          <table:table-cell table:style-name="ce373" table:formula="of:=IF([.A219]=0;0;(PMT([.$C$3];[.$C$4];-[.$C$2])))" office:value-type="float" office:value="0" calcext:value-type="float">
            <text:p>0.00</text:p>
          </table:table-cell>
          <table:table-cell table:style-name="ce373" table:formula="of:=IF([.A219]=0;0;([.$C$2]-[.F219]))" office:value-type="float" office:value="0" calcext:value-type="float">
            <text:p>0.00</text:p>
          </table:table-cell>
          <table:table-cell table:style-name="ce373" table:formula="of:=IF([.A219]=0;0;([.B219]+[.F21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19]&gt;=[.$C$4];0;IF([.A219]=0;0;(1+[.A219])))" office:value-type="float" office:value="0" calcext:value-type="float">
            <text:p>0</text:p>
          </table:table-cell>
          <table:table-cell table:style-name="ce373" table:formula="of:=IF([.A220]=0;0;(PPMT([.$C$3];[.A220];[.$C$4];-[.$C$2])))" office:value-type="float" office:value="0" calcext:value-type="float">
            <text:p>0.00</text:p>
          </table:table-cell>
          <table:table-cell table:style-name="ce373" table:formula="of:=IF([.A220]=0;0;(IPMT([.$C$3];[.A220];[.$C$4];-[.$C$2])))" office:value-type="float" office:value="0" calcext:value-type="float">
            <text:p>0.00</text:p>
          </table:table-cell>
          <table:table-cell table:style-name="ce373" table:formula="of:=IF([.A220]=0;0;(PMT([.$C$3];[.$C$4];-[.$C$2])))" office:value-type="float" office:value="0" calcext:value-type="float">
            <text:p>0.00</text:p>
          </table:table-cell>
          <table:table-cell table:style-name="ce373" table:formula="of:=IF([.A220]=0;0;([.$C$2]-[.F220]))" office:value-type="float" office:value="0" calcext:value-type="float">
            <text:p>0.00</text:p>
          </table:table-cell>
          <table:table-cell table:style-name="ce373" table:formula="of:=IF([.A220]=0;0;([.B220]+[.F21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0]&gt;=[.$C$4];0;IF([.A220]=0;0;(1+[.A220])))" office:value-type="float" office:value="0" calcext:value-type="float">
            <text:p>0</text:p>
          </table:table-cell>
          <table:table-cell table:style-name="ce373" table:formula="of:=IF([.A221]=0;0;(PPMT([.$C$3];[.A221];[.$C$4];-[.$C$2])))" office:value-type="float" office:value="0" calcext:value-type="float">
            <text:p>0.00</text:p>
          </table:table-cell>
          <table:table-cell table:style-name="ce373" table:formula="of:=IF([.A221]=0;0;(IPMT([.$C$3];[.A221];[.$C$4];-[.$C$2])))" office:value-type="float" office:value="0" calcext:value-type="float">
            <text:p>0.00</text:p>
          </table:table-cell>
          <table:table-cell table:style-name="ce373" table:formula="of:=IF([.A221]=0;0;(PMT([.$C$3];[.$C$4];-[.$C$2])))" office:value-type="float" office:value="0" calcext:value-type="float">
            <text:p>0.00</text:p>
          </table:table-cell>
          <table:table-cell table:style-name="ce373" table:formula="of:=IF([.A221]=0;0;([.$C$2]-[.F221]))" office:value-type="float" office:value="0" calcext:value-type="float">
            <text:p>0.00</text:p>
          </table:table-cell>
          <table:table-cell table:style-name="ce373" table:formula="of:=IF([.A221]=0;0;([.B221]+[.F22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1]&gt;=[.$C$4];0;IF([.A221]=0;0;(1+[.A221])))" office:value-type="float" office:value="0" calcext:value-type="float">
            <text:p>0</text:p>
          </table:table-cell>
          <table:table-cell table:style-name="ce373" table:formula="of:=IF([.A222]=0;0;(PPMT([.$C$3];[.A222];[.$C$4];-[.$C$2])))" office:value-type="float" office:value="0" calcext:value-type="float">
            <text:p>0.00</text:p>
          </table:table-cell>
          <table:table-cell table:style-name="ce373" table:formula="of:=IF([.A222]=0;0;(IPMT([.$C$3];[.A222];[.$C$4];-[.$C$2])))" office:value-type="float" office:value="0" calcext:value-type="float">
            <text:p>0.00</text:p>
          </table:table-cell>
          <table:table-cell table:style-name="ce373" table:formula="of:=IF([.A222]=0;0;(PMT([.$C$3];[.$C$4];-[.$C$2])))" office:value-type="float" office:value="0" calcext:value-type="float">
            <text:p>0.00</text:p>
          </table:table-cell>
          <table:table-cell table:style-name="ce373" table:formula="of:=IF([.A222]=0;0;([.$C$2]-[.F222]))" office:value-type="float" office:value="0" calcext:value-type="float">
            <text:p>0.00</text:p>
          </table:table-cell>
          <table:table-cell table:style-name="ce373" table:formula="of:=IF([.A222]=0;0;([.B222]+[.F22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2]&gt;=[.$C$4];0;IF([.A222]=0;0;(1+[.A222])))" office:value-type="float" office:value="0" calcext:value-type="float">
            <text:p>0</text:p>
          </table:table-cell>
          <table:table-cell table:style-name="ce373" table:formula="of:=IF([.A223]=0;0;(PPMT([.$C$3];[.A223];[.$C$4];-[.$C$2])))" office:value-type="float" office:value="0" calcext:value-type="float">
            <text:p>0.00</text:p>
          </table:table-cell>
          <table:table-cell table:style-name="ce373" table:formula="of:=IF([.A223]=0;0;(IPMT([.$C$3];[.A223];[.$C$4];-[.$C$2])))" office:value-type="float" office:value="0" calcext:value-type="float">
            <text:p>0.00</text:p>
          </table:table-cell>
          <table:table-cell table:style-name="ce373" table:formula="of:=IF([.A223]=0;0;(PMT([.$C$3];[.$C$4];-[.$C$2])))" office:value-type="float" office:value="0" calcext:value-type="float">
            <text:p>0.00</text:p>
          </table:table-cell>
          <table:table-cell table:style-name="ce373" table:formula="of:=IF([.A223]=0;0;([.$C$2]-[.F223]))" office:value-type="float" office:value="0" calcext:value-type="float">
            <text:p>0.00</text:p>
          </table:table-cell>
          <table:table-cell table:style-name="ce373" table:formula="of:=IF([.A223]=0;0;([.B223]+[.F22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3]&gt;=[.$C$4];0;IF([.A223]=0;0;(1+[.A223])))" office:value-type="float" office:value="0" calcext:value-type="float">
            <text:p>0</text:p>
          </table:table-cell>
          <table:table-cell table:style-name="ce373" table:formula="of:=IF([.A224]=0;0;(PPMT([.$C$3];[.A224];[.$C$4];-[.$C$2])))" office:value-type="float" office:value="0" calcext:value-type="float">
            <text:p>0.00</text:p>
          </table:table-cell>
          <table:table-cell table:style-name="ce373" table:formula="of:=IF([.A224]=0;0;(IPMT([.$C$3];[.A224];[.$C$4];-[.$C$2])))" office:value-type="float" office:value="0" calcext:value-type="float">
            <text:p>0.00</text:p>
          </table:table-cell>
          <table:table-cell table:style-name="ce373" table:formula="of:=IF([.A224]=0;0;(PMT([.$C$3];[.$C$4];-[.$C$2])))" office:value-type="float" office:value="0" calcext:value-type="float">
            <text:p>0.00</text:p>
          </table:table-cell>
          <table:table-cell table:style-name="ce373" table:formula="of:=IF([.A224]=0;0;([.$C$2]-[.F224]))" office:value-type="float" office:value="0" calcext:value-type="float">
            <text:p>0.00</text:p>
          </table:table-cell>
          <table:table-cell table:style-name="ce373" table:formula="of:=IF([.A224]=0;0;([.B224]+[.F22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4]&gt;=[.$C$4];0;IF([.A224]=0;0;(1+[.A224])))" office:value-type="float" office:value="0" calcext:value-type="float">
            <text:p>0</text:p>
          </table:table-cell>
          <table:table-cell table:style-name="ce373" table:formula="of:=IF([.A225]=0;0;(PPMT([.$C$3];[.A225];[.$C$4];-[.$C$2])))" office:value-type="float" office:value="0" calcext:value-type="float">
            <text:p>0.00</text:p>
          </table:table-cell>
          <table:table-cell table:style-name="ce373" table:formula="of:=IF([.A225]=0;0;(IPMT([.$C$3];[.A225];[.$C$4];-[.$C$2])))" office:value-type="float" office:value="0" calcext:value-type="float">
            <text:p>0.00</text:p>
          </table:table-cell>
          <table:table-cell table:style-name="ce373" table:formula="of:=IF([.A225]=0;0;(PMT([.$C$3];[.$C$4];-[.$C$2])))" office:value-type="float" office:value="0" calcext:value-type="float">
            <text:p>0.00</text:p>
          </table:table-cell>
          <table:table-cell table:style-name="ce373" table:formula="of:=IF([.A225]=0;0;([.$C$2]-[.F225]))" office:value-type="float" office:value="0" calcext:value-type="float">
            <text:p>0.00</text:p>
          </table:table-cell>
          <table:table-cell table:style-name="ce373" table:formula="of:=IF([.A225]=0;0;([.B225]+[.F22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5]&gt;=[.$C$4];0;IF([.A225]=0;0;(1+[.A225])))" office:value-type="float" office:value="0" calcext:value-type="float">
            <text:p>0</text:p>
          </table:table-cell>
          <table:table-cell table:style-name="ce373" table:formula="of:=IF([.A226]=0;0;(PPMT([.$C$3];[.A226];[.$C$4];-[.$C$2])))" office:value-type="float" office:value="0" calcext:value-type="float">
            <text:p>0.00</text:p>
          </table:table-cell>
          <table:table-cell table:style-name="ce373" table:formula="of:=IF([.A226]=0;0;(IPMT([.$C$3];[.A226];[.$C$4];-[.$C$2])))" office:value-type="float" office:value="0" calcext:value-type="float">
            <text:p>0.00</text:p>
          </table:table-cell>
          <table:table-cell table:style-name="ce373" table:formula="of:=IF([.A226]=0;0;(PMT([.$C$3];[.$C$4];-[.$C$2])))" office:value-type="float" office:value="0" calcext:value-type="float">
            <text:p>0.00</text:p>
          </table:table-cell>
          <table:table-cell table:style-name="ce373" table:formula="of:=IF([.A226]=0;0;([.$C$2]-[.F226]))" office:value-type="float" office:value="0" calcext:value-type="float">
            <text:p>0.00</text:p>
          </table:table-cell>
          <table:table-cell table:style-name="ce373" table:formula="of:=IF([.A226]=0;0;([.B226]+[.F22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6]&gt;=[.$C$4];0;IF([.A226]=0;0;(1+[.A226])))" office:value-type="float" office:value="0" calcext:value-type="float">
            <text:p>0</text:p>
          </table:table-cell>
          <table:table-cell table:style-name="ce373" table:formula="of:=IF([.A227]=0;0;(PPMT([.$C$3];[.A227];[.$C$4];-[.$C$2])))" office:value-type="float" office:value="0" calcext:value-type="float">
            <text:p>0.00</text:p>
          </table:table-cell>
          <table:table-cell table:style-name="ce373" table:formula="of:=IF([.A227]=0;0;(IPMT([.$C$3];[.A227];[.$C$4];-[.$C$2])))" office:value-type="float" office:value="0" calcext:value-type="float">
            <text:p>0.00</text:p>
          </table:table-cell>
          <table:table-cell table:style-name="ce373" table:formula="of:=IF([.A227]=0;0;(PMT([.$C$3];[.$C$4];-[.$C$2])))" office:value-type="float" office:value="0" calcext:value-type="float">
            <text:p>0.00</text:p>
          </table:table-cell>
          <table:table-cell table:style-name="ce373" table:formula="of:=IF([.A227]=0;0;([.$C$2]-[.F227]))" office:value-type="float" office:value="0" calcext:value-type="float">
            <text:p>0.00</text:p>
          </table:table-cell>
          <table:table-cell table:style-name="ce373" table:formula="of:=IF([.A227]=0;0;([.B227]+[.F22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7]&gt;=[.$C$4];0;IF([.A227]=0;0;(1+[.A227])))" office:value-type="float" office:value="0" calcext:value-type="float">
            <text:p>0</text:p>
          </table:table-cell>
          <table:table-cell table:style-name="ce373" table:formula="of:=IF([.A228]=0;0;(PPMT([.$C$3];[.A228];[.$C$4];-[.$C$2])))" office:value-type="float" office:value="0" calcext:value-type="float">
            <text:p>0.00</text:p>
          </table:table-cell>
          <table:table-cell table:style-name="ce373" table:formula="of:=IF([.A228]=0;0;(IPMT([.$C$3];[.A228];[.$C$4];-[.$C$2])))" office:value-type="float" office:value="0" calcext:value-type="float">
            <text:p>0.00</text:p>
          </table:table-cell>
          <table:table-cell table:style-name="ce373" table:formula="of:=IF([.A228]=0;0;(PMT([.$C$3];[.$C$4];-[.$C$2])))" office:value-type="float" office:value="0" calcext:value-type="float">
            <text:p>0.00</text:p>
          </table:table-cell>
          <table:table-cell table:style-name="ce373" table:formula="of:=IF([.A228]=0;0;([.$C$2]-[.F228]))" office:value-type="float" office:value="0" calcext:value-type="float">
            <text:p>0.00</text:p>
          </table:table-cell>
          <table:table-cell table:style-name="ce373" table:formula="of:=IF([.A228]=0;0;([.B228]+[.F22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8]&gt;=[.$C$4];0;IF([.A228]=0;0;(1+[.A228])))" office:value-type="float" office:value="0" calcext:value-type="float">
            <text:p>0</text:p>
          </table:table-cell>
          <table:table-cell table:style-name="ce373" table:formula="of:=IF([.A229]=0;0;(PPMT([.$C$3];[.A229];[.$C$4];-[.$C$2])))" office:value-type="float" office:value="0" calcext:value-type="float">
            <text:p>0.00</text:p>
          </table:table-cell>
          <table:table-cell table:style-name="ce373" table:formula="of:=IF([.A229]=0;0;(IPMT([.$C$3];[.A229];[.$C$4];-[.$C$2])))" office:value-type="float" office:value="0" calcext:value-type="float">
            <text:p>0.00</text:p>
          </table:table-cell>
          <table:table-cell table:style-name="ce373" table:formula="of:=IF([.A229]=0;0;(PMT([.$C$3];[.$C$4];-[.$C$2])))" office:value-type="float" office:value="0" calcext:value-type="float">
            <text:p>0.00</text:p>
          </table:table-cell>
          <table:table-cell table:style-name="ce373" table:formula="of:=IF([.A229]=0;0;([.$C$2]-[.F229]))" office:value-type="float" office:value="0" calcext:value-type="float">
            <text:p>0.00</text:p>
          </table:table-cell>
          <table:table-cell table:style-name="ce373" table:formula="of:=IF([.A229]=0;0;([.B229]+[.F22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29]&gt;=[.$C$4];0;IF([.A229]=0;0;(1+[.A229])))" office:value-type="float" office:value="0" calcext:value-type="float">
            <text:p>0</text:p>
          </table:table-cell>
          <table:table-cell table:style-name="ce373" table:formula="of:=IF([.A230]=0;0;(PPMT([.$C$3];[.A230];[.$C$4];-[.$C$2])))" office:value-type="float" office:value="0" calcext:value-type="float">
            <text:p>0.00</text:p>
          </table:table-cell>
          <table:table-cell table:style-name="ce373" table:formula="of:=IF([.A230]=0;0;(IPMT([.$C$3];[.A230];[.$C$4];-[.$C$2])))" office:value-type="float" office:value="0" calcext:value-type="float">
            <text:p>0.00</text:p>
          </table:table-cell>
          <table:table-cell table:style-name="ce373" table:formula="of:=IF([.A230]=0;0;(PMT([.$C$3];[.$C$4];-[.$C$2])))" office:value-type="float" office:value="0" calcext:value-type="float">
            <text:p>0.00</text:p>
          </table:table-cell>
          <table:table-cell table:style-name="ce373" table:formula="of:=IF([.A230]=0;0;([.$C$2]-[.F230]))" office:value-type="float" office:value="0" calcext:value-type="float">
            <text:p>0.00</text:p>
          </table:table-cell>
          <table:table-cell table:style-name="ce373" table:formula="of:=IF([.A230]=0;0;([.B230]+[.F22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0]&gt;=[.$C$4];0;IF([.A230]=0;0;(1+[.A230])))" office:value-type="float" office:value="0" calcext:value-type="float">
            <text:p>0</text:p>
          </table:table-cell>
          <table:table-cell table:style-name="ce373" table:formula="of:=IF([.A231]=0;0;(PPMT([.$C$3];[.A231];[.$C$4];-[.$C$2])))" office:value-type="float" office:value="0" calcext:value-type="float">
            <text:p>0.00</text:p>
          </table:table-cell>
          <table:table-cell table:style-name="ce373" table:formula="of:=IF([.A231]=0;0;(IPMT([.$C$3];[.A231];[.$C$4];-[.$C$2])))" office:value-type="float" office:value="0" calcext:value-type="float">
            <text:p>0.00</text:p>
          </table:table-cell>
          <table:table-cell table:style-name="ce373" table:formula="of:=IF([.A231]=0;0;(PMT([.$C$3];[.$C$4];-[.$C$2])))" office:value-type="float" office:value="0" calcext:value-type="float">
            <text:p>0.00</text:p>
          </table:table-cell>
          <table:table-cell table:style-name="ce373" table:formula="of:=IF([.A231]=0;0;([.$C$2]-[.F231]))" office:value-type="float" office:value="0" calcext:value-type="float">
            <text:p>0.00</text:p>
          </table:table-cell>
          <table:table-cell table:style-name="ce373" table:formula="of:=IF([.A231]=0;0;([.B231]+[.F23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1]&gt;=[.$C$4];0;IF([.A231]=0;0;(1+[.A231])))" office:value-type="float" office:value="0" calcext:value-type="float">
            <text:p>0</text:p>
          </table:table-cell>
          <table:table-cell table:style-name="ce373" table:formula="of:=IF([.A232]=0;0;(PPMT([.$C$3];[.A232];[.$C$4];-[.$C$2])))" office:value-type="float" office:value="0" calcext:value-type="float">
            <text:p>0.00</text:p>
          </table:table-cell>
          <table:table-cell table:style-name="ce373" table:formula="of:=IF([.A232]=0;0;(IPMT([.$C$3];[.A232];[.$C$4];-[.$C$2])))" office:value-type="float" office:value="0" calcext:value-type="float">
            <text:p>0.00</text:p>
          </table:table-cell>
          <table:table-cell table:style-name="ce373" table:formula="of:=IF([.A232]=0;0;(PMT([.$C$3];[.$C$4];-[.$C$2])))" office:value-type="float" office:value="0" calcext:value-type="float">
            <text:p>0.00</text:p>
          </table:table-cell>
          <table:table-cell table:style-name="ce373" table:formula="of:=IF([.A232]=0;0;([.$C$2]-[.F232]))" office:value-type="float" office:value="0" calcext:value-type="float">
            <text:p>0.00</text:p>
          </table:table-cell>
          <table:table-cell table:style-name="ce373" table:formula="of:=IF([.A232]=0;0;([.B232]+[.F23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2]&gt;=[.$C$4];0;IF([.A232]=0;0;(1+[.A232])))" office:value-type="float" office:value="0" calcext:value-type="float">
            <text:p>0</text:p>
          </table:table-cell>
          <table:table-cell table:style-name="ce373" table:formula="of:=IF([.A233]=0;0;(PPMT([.$C$3];[.A233];[.$C$4];-[.$C$2])))" office:value-type="float" office:value="0" calcext:value-type="float">
            <text:p>0.00</text:p>
          </table:table-cell>
          <table:table-cell table:style-name="ce373" table:formula="of:=IF([.A233]=0;0;(IPMT([.$C$3];[.A233];[.$C$4];-[.$C$2])))" office:value-type="float" office:value="0" calcext:value-type="float">
            <text:p>0.00</text:p>
          </table:table-cell>
          <table:table-cell table:style-name="ce373" table:formula="of:=IF([.A233]=0;0;(PMT([.$C$3];[.$C$4];-[.$C$2])))" office:value-type="float" office:value="0" calcext:value-type="float">
            <text:p>0.00</text:p>
          </table:table-cell>
          <table:table-cell table:style-name="ce373" table:formula="of:=IF([.A233]=0;0;([.$C$2]-[.F233]))" office:value-type="float" office:value="0" calcext:value-type="float">
            <text:p>0.00</text:p>
          </table:table-cell>
          <table:table-cell table:style-name="ce373" table:formula="of:=IF([.A233]=0;0;([.B233]+[.F23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3]&gt;=[.$C$4];0;IF([.A233]=0;0;(1+[.A233])))" office:value-type="float" office:value="0" calcext:value-type="float">
            <text:p>0</text:p>
          </table:table-cell>
          <table:table-cell table:style-name="ce373" table:formula="of:=IF([.A234]=0;0;(PPMT([.$C$3];[.A234];[.$C$4];-[.$C$2])))" office:value-type="float" office:value="0" calcext:value-type="float">
            <text:p>0.00</text:p>
          </table:table-cell>
          <table:table-cell table:style-name="ce373" table:formula="of:=IF([.A234]=0;0;(IPMT([.$C$3];[.A234];[.$C$4];-[.$C$2])))" office:value-type="float" office:value="0" calcext:value-type="float">
            <text:p>0.00</text:p>
          </table:table-cell>
          <table:table-cell table:style-name="ce373" table:formula="of:=IF([.A234]=0;0;(PMT([.$C$3];[.$C$4];-[.$C$2])))" office:value-type="float" office:value="0" calcext:value-type="float">
            <text:p>0.00</text:p>
          </table:table-cell>
          <table:table-cell table:style-name="ce373" table:formula="of:=IF([.A234]=0;0;([.$C$2]-[.F234]))" office:value-type="float" office:value="0" calcext:value-type="float">
            <text:p>0.00</text:p>
          </table:table-cell>
          <table:table-cell table:style-name="ce373" table:formula="of:=IF([.A234]=0;0;([.B234]+[.F23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4]&gt;=[.$C$4];0;IF([.A234]=0;0;(1+[.A234])))" office:value-type="float" office:value="0" calcext:value-type="float">
            <text:p>0</text:p>
          </table:table-cell>
          <table:table-cell table:style-name="ce373" table:formula="of:=IF([.A235]=0;0;(PPMT([.$C$3];[.A235];[.$C$4];-[.$C$2])))" office:value-type="float" office:value="0" calcext:value-type="float">
            <text:p>0.00</text:p>
          </table:table-cell>
          <table:table-cell table:style-name="ce373" table:formula="of:=IF([.A235]=0;0;(IPMT([.$C$3];[.A235];[.$C$4];-[.$C$2])))" office:value-type="float" office:value="0" calcext:value-type="float">
            <text:p>0.00</text:p>
          </table:table-cell>
          <table:table-cell table:style-name="ce373" table:formula="of:=IF([.A235]=0;0;(PMT([.$C$3];[.$C$4];-[.$C$2])))" office:value-type="float" office:value="0" calcext:value-type="float">
            <text:p>0.00</text:p>
          </table:table-cell>
          <table:table-cell table:style-name="ce373" table:formula="of:=IF([.A235]=0;0;([.$C$2]-[.F235]))" office:value-type="float" office:value="0" calcext:value-type="float">
            <text:p>0.00</text:p>
          </table:table-cell>
          <table:table-cell table:style-name="ce373" table:formula="of:=IF([.A235]=0;0;([.B235]+[.F23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5]&gt;=[.$C$4];0;IF([.A235]=0;0;(1+[.A235])))" office:value-type="float" office:value="0" calcext:value-type="float">
            <text:p>0</text:p>
          </table:table-cell>
          <table:table-cell table:style-name="ce373" table:formula="of:=IF([.A236]=0;0;(PPMT([.$C$3];[.A236];[.$C$4];-[.$C$2])))" office:value-type="float" office:value="0" calcext:value-type="float">
            <text:p>0.00</text:p>
          </table:table-cell>
          <table:table-cell table:style-name="ce373" table:formula="of:=IF([.A236]=0;0;(IPMT([.$C$3];[.A236];[.$C$4];-[.$C$2])))" office:value-type="float" office:value="0" calcext:value-type="float">
            <text:p>0.00</text:p>
          </table:table-cell>
          <table:table-cell table:style-name="ce373" table:formula="of:=IF([.A236]=0;0;(PMT([.$C$3];[.$C$4];-[.$C$2])))" office:value-type="float" office:value="0" calcext:value-type="float">
            <text:p>0.00</text:p>
          </table:table-cell>
          <table:table-cell table:style-name="ce373" table:formula="of:=IF([.A236]=0;0;([.$C$2]-[.F236]))" office:value-type="float" office:value="0" calcext:value-type="float">
            <text:p>0.00</text:p>
          </table:table-cell>
          <table:table-cell table:style-name="ce373" table:formula="of:=IF([.A236]=0;0;([.B236]+[.F23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6]&gt;=[.$C$4];0;IF([.A236]=0;0;(1+[.A236])))" office:value-type="float" office:value="0" calcext:value-type="float">
            <text:p>0</text:p>
          </table:table-cell>
          <table:table-cell table:style-name="ce373" table:formula="of:=IF([.A237]=0;0;(PPMT([.$C$3];[.A237];[.$C$4];-[.$C$2])))" office:value-type="float" office:value="0" calcext:value-type="float">
            <text:p>0.00</text:p>
          </table:table-cell>
          <table:table-cell table:style-name="ce373" table:formula="of:=IF([.A237]=0;0;(IPMT([.$C$3];[.A237];[.$C$4];-[.$C$2])))" office:value-type="float" office:value="0" calcext:value-type="float">
            <text:p>0.00</text:p>
          </table:table-cell>
          <table:table-cell table:style-name="ce373" table:formula="of:=IF([.A237]=0;0;(PMT([.$C$3];[.$C$4];-[.$C$2])))" office:value-type="float" office:value="0" calcext:value-type="float">
            <text:p>0.00</text:p>
          </table:table-cell>
          <table:table-cell table:style-name="ce373" table:formula="of:=IF([.A237]=0;0;([.$C$2]-[.F237]))" office:value-type="float" office:value="0" calcext:value-type="float">
            <text:p>0.00</text:p>
          </table:table-cell>
          <table:table-cell table:style-name="ce373" table:formula="of:=IF([.A237]=0;0;([.B237]+[.F23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7]&gt;=[.$C$4];0;IF([.A237]=0;0;(1+[.A237])))" office:value-type="float" office:value="0" calcext:value-type="float">
            <text:p>0</text:p>
          </table:table-cell>
          <table:table-cell table:style-name="ce373" table:formula="of:=IF([.A238]=0;0;(PPMT([.$C$3];[.A238];[.$C$4];-[.$C$2])))" office:value-type="float" office:value="0" calcext:value-type="float">
            <text:p>0.00</text:p>
          </table:table-cell>
          <table:table-cell table:style-name="ce373" table:formula="of:=IF([.A238]=0;0;(IPMT([.$C$3];[.A238];[.$C$4];-[.$C$2])))" office:value-type="float" office:value="0" calcext:value-type="float">
            <text:p>0.00</text:p>
          </table:table-cell>
          <table:table-cell table:style-name="ce373" table:formula="of:=IF([.A238]=0;0;(PMT([.$C$3];[.$C$4];-[.$C$2])))" office:value-type="float" office:value="0" calcext:value-type="float">
            <text:p>0.00</text:p>
          </table:table-cell>
          <table:table-cell table:style-name="ce373" table:formula="of:=IF([.A238]=0;0;([.$C$2]-[.F238]))" office:value-type="float" office:value="0" calcext:value-type="float">
            <text:p>0.00</text:p>
          </table:table-cell>
          <table:table-cell table:style-name="ce373" table:formula="of:=IF([.A238]=0;0;([.B238]+[.F23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8]&gt;=[.$C$4];0;IF([.A238]=0;0;(1+[.A238])))" office:value-type="float" office:value="0" calcext:value-type="float">
            <text:p>0</text:p>
          </table:table-cell>
          <table:table-cell table:style-name="ce373" table:formula="of:=IF([.A239]=0;0;(PPMT([.$C$3];[.A239];[.$C$4];-[.$C$2])))" office:value-type="float" office:value="0" calcext:value-type="float">
            <text:p>0.00</text:p>
          </table:table-cell>
          <table:table-cell table:style-name="ce373" table:formula="of:=IF([.A239]=0;0;(IPMT([.$C$3];[.A239];[.$C$4];-[.$C$2])))" office:value-type="float" office:value="0" calcext:value-type="float">
            <text:p>0.00</text:p>
          </table:table-cell>
          <table:table-cell table:style-name="ce373" table:formula="of:=IF([.A239]=0;0;(PMT([.$C$3];[.$C$4];-[.$C$2])))" office:value-type="float" office:value="0" calcext:value-type="float">
            <text:p>0.00</text:p>
          </table:table-cell>
          <table:table-cell table:style-name="ce373" table:formula="of:=IF([.A239]=0;0;([.$C$2]-[.F239]))" office:value-type="float" office:value="0" calcext:value-type="float">
            <text:p>0.00</text:p>
          </table:table-cell>
          <table:table-cell table:style-name="ce373" table:formula="of:=IF([.A239]=0;0;([.B239]+[.F23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39]&gt;=[.$C$4];0;IF([.A239]=0;0;(1+[.A239])))" office:value-type="float" office:value="0" calcext:value-type="float">
            <text:p>0</text:p>
          </table:table-cell>
          <table:table-cell table:style-name="ce373" table:formula="of:=IF([.A240]=0;0;(PPMT([.$C$3];[.A240];[.$C$4];-[.$C$2])))" office:value-type="float" office:value="0" calcext:value-type="float">
            <text:p>0.00</text:p>
          </table:table-cell>
          <table:table-cell table:style-name="ce373" table:formula="of:=IF([.A240]=0;0;(IPMT([.$C$3];[.A240];[.$C$4];-[.$C$2])))" office:value-type="float" office:value="0" calcext:value-type="float">
            <text:p>0.00</text:p>
          </table:table-cell>
          <table:table-cell table:style-name="ce373" table:formula="of:=IF([.A240]=0;0;(PMT([.$C$3];[.$C$4];-[.$C$2])))" office:value-type="float" office:value="0" calcext:value-type="float">
            <text:p>0.00</text:p>
          </table:table-cell>
          <table:table-cell table:style-name="ce373" table:formula="of:=IF([.A240]=0;0;([.$C$2]-[.F240]))" office:value-type="float" office:value="0" calcext:value-type="float">
            <text:p>0.00</text:p>
          </table:table-cell>
          <table:table-cell table:style-name="ce373" table:formula="of:=IF([.A240]=0;0;([.B240]+[.F23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0]&gt;=[.$C$4];0;IF([.A240]=0;0;(1+[.A240])))" office:value-type="float" office:value="0" calcext:value-type="float">
            <text:p>0</text:p>
          </table:table-cell>
          <table:table-cell table:style-name="ce373" table:formula="of:=IF([.A241]=0;0;(PPMT([.$C$3];[.A241];[.$C$4];-[.$C$2])))" office:value-type="float" office:value="0" calcext:value-type="float">
            <text:p>0.00</text:p>
          </table:table-cell>
          <table:table-cell table:style-name="ce373" table:formula="of:=IF([.A241]=0;0;(IPMT([.$C$3];[.A241];[.$C$4];-[.$C$2])))" office:value-type="float" office:value="0" calcext:value-type="float">
            <text:p>0.00</text:p>
          </table:table-cell>
          <table:table-cell table:style-name="ce373" table:formula="of:=IF([.A241]=0;0;(PMT([.$C$3];[.$C$4];-[.$C$2])))" office:value-type="float" office:value="0" calcext:value-type="float">
            <text:p>0.00</text:p>
          </table:table-cell>
          <table:table-cell table:style-name="ce373" table:formula="of:=IF([.A241]=0;0;([.$C$2]-[.F241]))" office:value-type="float" office:value="0" calcext:value-type="float">
            <text:p>0.00</text:p>
          </table:table-cell>
          <table:table-cell table:style-name="ce373" table:formula="of:=IF([.A241]=0;0;([.B241]+[.F24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1]&gt;=[.$C$4];0;IF([.A241]=0;0;(1+[.A241])))" office:value-type="float" office:value="0" calcext:value-type="float">
            <text:p>0</text:p>
          </table:table-cell>
          <table:table-cell table:style-name="ce373" table:formula="of:=IF([.A242]=0;0;(PPMT([.$C$3];[.A242];[.$C$4];-[.$C$2])))" office:value-type="float" office:value="0" calcext:value-type="float">
            <text:p>0.00</text:p>
          </table:table-cell>
          <table:table-cell table:style-name="ce373" table:formula="of:=IF([.A242]=0;0;(IPMT([.$C$3];[.A242];[.$C$4];-[.$C$2])))" office:value-type="float" office:value="0" calcext:value-type="float">
            <text:p>0.00</text:p>
          </table:table-cell>
          <table:table-cell table:style-name="ce373" table:formula="of:=IF([.A242]=0;0;(PMT([.$C$3];[.$C$4];-[.$C$2])))" office:value-type="float" office:value="0" calcext:value-type="float">
            <text:p>0.00</text:p>
          </table:table-cell>
          <table:table-cell table:style-name="ce373" table:formula="of:=IF([.A242]=0;0;([.$C$2]-[.F242]))" office:value-type="float" office:value="0" calcext:value-type="float">
            <text:p>0.00</text:p>
          </table:table-cell>
          <table:table-cell table:style-name="ce373" table:formula="of:=IF([.A242]=0;0;([.B242]+[.F24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2]&gt;=[.$C$4];0;IF([.A242]=0;0;(1+[.A242])))" office:value-type="float" office:value="0" calcext:value-type="float">
            <text:p>0</text:p>
          </table:table-cell>
          <table:table-cell table:style-name="ce373" table:formula="of:=IF([.A243]=0;0;(PPMT([.$C$3];[.A243];[.$C$4];-[.$C$2])))" office:value-type="float" office:value="0" calcext:value-type="float">
            <text:p>0.00</text:p>
          </table:table-cell>
          <table:table-cell table:style-name="ce373" table:formula="of:=IF([.A243]=0;0;(IPMT([.$C$3];[.A243];[.$C$4];-[.$C$2])))" office:value-type="float" office:value="0" calcext:value-type="float">
            <text:p>0.00</text:p>
          </table:table-cell>
          <table:table-cell table:style-name="ce373" table:formula="of:=IF([.A243]=0;0;(PMT([.$C$3];[.$C$4];-[.$C$2])))" office:value-type="float" office:value="0" calcext:value-type="float">
            <text:p>0.00</text:p>
          </table:table-cell>
          <table:table-cell table:style-name="ce373" table:formula="of:=IF([.A243]=0;0;([.$C$2]-[.F243]))" office:value-type="float" office:value="0" calcext:value-type="float">
            <text:p>0.00</text:p>
          </table:table-cell>
          <table:table-cell table:style-name="ce373" table:formula="of:=IF([.A243]=0;0;([.B243]+[.F24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3]&gt;=[.$C$4];0;IF([.A243]=0;0;(1+[.A243])))" office:value-type="float" office:value="0" calcext:value-type="float">
            <text:p>0</text:p>
          </table:table-cell>
          <table:table-cell table:style-name="ce373" table:formula="of:=IF([.A244]=0;0;(PPMT([.$C$3];[.A244];[.$C$4];-[.$C$2])))" office:value-type="float" office:value="0" calcext:value-type="float">
            <text:p>0.00</text:p>
          </table:table-cell>
          <table:table-cell table:style-name="ce373" table:formula="of:=IF([.A244]=0;0;(IPMT([.$C$3];[.A244];[.$C$4];-[.$C$2])))" office:value-type="float" office:value="0" calcext:value-type="float">
            <text:p>0.00</text:p>
          </table:table-cell>
          <table:table-cell table:style-name="ce373" table:formula="of:=IF([.A244]=0;0;(PMT([.$C$3];[.$C$4];-[.$C$2])))" office:value-type="float" office:value="0" calcext:value-type="float">
            <text:p>0.00</text:p>
          </table:table-cell>
          <table:table-cell table:style-name="ce373" table:formula="of:=IF([.A244]=0;0;([.$C$2]-[.F244]))" office:value-type="float" office:value="0" calcext:value-type="float">
            <text:p>0.00</text:p>
          </table:table-cell>
          <table:table-cell table:style-name="ce373" table:formula="of:=IF([.A244]=0;0;([.B244]+[.F24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4]&gt;=[.$C$4];0;IF([.A244]=0;0;(1+[.A244])))" office:value-type="float" office:value="0" calcext:value-type="float">
            <text:p>0</text:p>
          </table:table-cell>
          <table:table-cell table:style-name="ce373" table:formula="of:=IF([.A245]=0;0;(PPMT([.$C$3];[.A245];[.$C$4];-[.$C$2])))" office:value-type="float" office:value="0" calcext:value-type="float">
            <text:p>0.00</text:p>
          </table:table-cell>
          <table:table-cell table:style-name="ce373" table:formula="of:=IF([.A245]=0;0;(IPMT([.$C$3];[.A245];[.$C$4];-[.$C$2])))" office:value-type="float" office:value="0" calcext:value-type="float">
            <text:p>0.00</text:p>
          </table:table-cell>
          <table:table-cell table:style-name="ce373" table:formula="of:=IF([.A245]=0;0;(PMT([.$C$3];[.$C$4];-[.$C$2])))" office:value-type="float" office:value="0" calcext:value-type="float">
            <text:p>0.00</text:p>
          </table:table-cell>
          <table:table-cell table:style-name="ce373" table:formula="of:=IF([.A245]=0;0;([.$C$2]-[.F245]))" office:value-type="float" office:value="0" calcext:value-type="float">
            <text:p>0.00</text:p>
          </table:table-cell>
          <table:table-cell table:style-name="ce373" table:formula="of:=IF([.A245]=0;0;([.B245]+[.F24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5]&gt;=[.$C$4];0;IF([.A245]=0;0;(1+[.A245])))" office:value-type="float" office:value="0" calcext:value-type="float">
            <text:p>0</text:p>
          </table:table-cell>
          <table:table-cell table:style-name="ce373" table:formula="of:=IF([.A246]=0;0;(PPMT([.$C$3];[.A246];[.$C$4];-[.$C$2])))" office:value-type="float" office:value="0" calcext:value-type="float">
            <text:p>0.00</text:p>
          </table:table-cell>
          <table:table-cell table:style-name="ce373" table:formula="of:=IF([.A246]=0;0;(IPMT([.$C$3];[.A246];[.$C$4];-[.$C$2])))" office:value-type="float" office:value="0" calcext:value-type="float">
            <text:p>0.00</text:p>
          </table:table-cell>
          <table:table-cell table:style-name="ce373" table:formula="of:=IF([.A246]=0;0;(PMT([.$C$3];[.$C$4];-[.$C$2])))" office:value-type="float" office:value="0" calcext:value-type="float">
            <text:p>0.00</text:p>
          </table:table-cell>
          <table:table-cell table:style-name="ce373" table:formula="of:=IF([.A246]=0;0;([.$C$2]-[.F246]))" office:value-type="float" office:value="0" calcext:value-type="float">
            <text:p>0.00</text:p>
          </table:table-cell>
          <table:table-cell table:style-name="ce373" table:formula="of:=IF([.A246]=0;0;([.B246]+[.F24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6]&gt;=[.$C$4];0;IF([.A246]=0;0;(1+[.A246])))" office:value-type="float" office:value="0" calcext:value-type="float">
            <text:p>0</text:p>
          </table:table-cell>
          <table:table-cell table:style-name="ce373" table:formula="of:=IF([.A247]=0;0;(PPMT([.$C$3];[.A247];[.$C$4];-[.$C$2])))" office:value-type="float" office:value="0" calcext:value-type="float">
            <text:p>0.00</text:p>
          </table:table-cell>
          <table:table-cell table:style-name="ce373" table:formula="of:=IF([.A247]=0;0;(IPMT([.$C$3];[.A247];[.$C$4];-[.$C$2])))" office:value-type="float" office:value="0" calcext:value-type="float">
            <text:p>0.00</text:p>
          </table:table-cell>
          <table:table-cell table:style-name="ce373" table:formula="of:=IF([.A247]=0;0;(PMT([.$C$3];[.$C$4];-[.$C$2])))" office:value-type="float" office:value="0" calcext:value-type="float">
            <text:p>0.00</text:p>
          </table:table-cell>
          <table:table-cell table:style-name="ce373" table:formula="of:=IF([.A247]=0;0;([.$C$2]-[.F247]))" office:value-type="float" office:value="0" calcext:value-type="float">
            <text:p>0.00</text:p>
          </table:table-cell>
          <table:table-cell table:style-name="ce373" table:formula="of:=IF([.A247]=0;0;([.B247]+[.F24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7]&gt;=[.$C$4];0;IF([.A247]=0;0;(1+[.A247])))" office:value-type="float" office:value="0" calcext:value-type="float">
            <text:p>0</text:p>
          </table:table-cell>
          <table:table-cell table:style-name="ce373" table:formula="of:=IF([.A248]=0;0;(PPMT([.$C$3];[.A248];[.$C$4];-[.$C$2])))" office:value-type="float" office:value="0" calcext:value-type="float">
            <text:p>0.00</text:p>
          </table:table-cell>
          <table:table-cell table:style-name="ce373" table:formula="of:=IF([.A248]=0;0;(IPMT([.$C$3];[.A248];[.$C$4];-[.$C$2])))" office:value-type="float" office:value="0" calcext:value-type="float">
            <text:p>0.00</text:p>
          </table:table-cell>
          <table:table-cell table:style-name="ce373" table:formula="of:=IF([.A248]=0;0;(PMT([.$C$3];[.$C$4];-[.$C$2])))" office:value-type="float" office:value="0" calcext:value-type="float">
            <text:p>0.00</text:p>
          </table:table-cell>
          <table:table-cell table:style-name="ce373" table:formula="of:=IF([.A248]=0;0;([.$C$2]-[.F248]))" office:value-type="float" office:value="0" calcext:value-type="float">
            <text:p>0.00</text:p>
          </table:table-cell>
          <table:table-cell table:style-name="ce373" table:formula="of:=IF([.A248]=0;0;([.B248]+[.F24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8]&gt;=[.$C$4];0;IF([.A248]=0;0;(1+[.A248])))" office:value-type="float" office:value="0" calcext:value-type="float">
            <text:p>0</text:p>
          </table:table-cell>
          <table:table-cell table:style-name="ce373" table:formula="of:=IF([.A249]=0;0;(PPMT([.$C$3];[.A249];[.$C$4];-[.$C$2])))" office:value-type="float" office:value="0" calcext:value-type="float">
            <text:p>0.00</text:p>
          </table:table-cell>
          <table:table-cell table:style-name="ce373" table:formula="of:=IF([.A249]=0;0;(IPMT([.$C$3];[.A249];[.$C$4];-[.$C$2])))" office:value-type="float" office:value="0" calcext:value-type="float">
            <text:p>0.00</text:p>
          </table:table-cell>
          <table:table-cell table:style-name="ce373" table:formula="of:=IF([.A249]=0;0;(PMT([.$C$3];[.$C$4];-[.$C$2])))" office:value-type="float" office:value="0" calcext:value-type="float">
            <text:p>0.00</text:p>
          </table:table-cell>
          <table:table-cell table:style-name="ce373" table:formula="of:=IF([.A249]=0;0;([.$C$2]-[.F249]))" office:value-type="float" office:value="0" calcext:value-type="float">
            <text:p>0.00</text:p>
          </table:table-cell>
          <table:table-cell table:style-name="ce373" table:formula="of:=IF([.A249]=0;0;([.B249]+[.F24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49]&gt;=[.$C$4];0;IF([.A249]=0;0;(1+[.A249])))" office:value-type="float" office:value="0" calcext:value-type="float">
            <text:p>0</text:p>
          </table:table-cell>
          <table:table-cell table:style-name="ce373" table:formula="of:=IF([.A250]=0;0;(PPMT([.$C$3];[.A250];[.$C$4];-[.$C$2])))" office:value-type="float" office:value="0" calcext:value-type="float">
            <text:p>0.00</text:p>
          </table:table-cell>
          <table:table-cell table:style-name="ce373" table:formula="of:=IF([.A250]=0;0;(IPMT([.$C$3];[.A250];[.$C$4];-[.$C$2])))" office:value-type="float" office:value="0" calcext:value-type="float">
            <text:p>0.00</text:p>
          </table:table-cell>
          <table:table-cell table:style-name="ce373" table:formula="of:=IF([.A250]=0;0;(PMT([.$C$3];[.$C$4];-[.$C$2])))" office:value-type="float" office:value="0" calcext:value-type="float">
            <text:p>0.00</text:p>
          </table:table-cell>
          <table:table-cell table:style-name="ce373" table:formula="of:=IF([.A250]=0;0;([.$C$2]-[.F250]))" office:value-type="float" office:value="0" calcext:value-type="float">
            <text:p>0.00</text:p>
          </table:table-cell>
          <table:table-cell table:style-name="ce373" table:formula="of:=IF([.A250]=0;0;([.B250]+[.F24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0]&gt;=[.$C$4];0;IF([.A250]=0;0;(1+[.A250])))" office:value-type="float" office:value="0" calcext:value-type="float">
            <text:p>0</text:p>
          </table:table-cell>
          <table:table-cell table:style-name="ce373" table:formula="of:=IF([.A251]=0;0;(PPMT([.$C$3];[.A251];[.$C$4];-[.$C$2])))" office:value-type="float" office:value="0" calcext:value-type="float">
            <text:p>0.00</text:p>
          </table:table-cell>
          <table:table-cell table:style-name="ce373" table:formula="of:=IF([.A251]=0;0;(IPMT([.$C$3];[.A251];[.$C$4];-[.$C$2])))" office:value-type="float" office:value="0" calcext:value-type="float">
            <text:p>0.00</text:p>
          </table:table-cell>
          <table:table-cell table:style-name="ce373" table:formula="of:=IF([.A251]=0;0;(PMT([.$C$3];[.$C$4];-[.$C$2])))" office:value-type="float" office:value="0" calcext:value-type="float">
            <text:p>0.00</text:p>
          </table:table-cell>
          <table:table-cell table:style-name="ce373" table:formula="of:=IF([.A251]=0;0;([.$C$2]-[.F251]))" office:value-type="float" office:value="0" calcext:value-type="float">
            <text:p>0.00</text:p>
          </table:table-cell>
          <table:table-cell table:style-name="ce373" table:formula="of:=IF([.A251]=0;0;([.B251]+[.F25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1]&gt;=[.$C$4];0;IF([.A251]=0;0;(1+[.A251])))" office:value-type="float" office:value="0" calcext:value-type="float">
            <text:p>0</text:p>
          </table:table-cell>
          <table:table-cell table:style-name="ce373" table:formula="of:=IF([.A252]=0;0;(PPMT([.$C$3];[.A252];[.$C$4];-[.$C$2])))" office:value-type="float" office:value="0" calcext:value-type="float">
            <text:p>0.00</text:p>
          </table:table-cell>
          <table:table-cell table:style-name="ce373" table:formula="of:=IF([.A252]=0;0;(IPMT([.$C$3];[.A252];[.$C$4];-[.$C$2])))" office:value-type="float" office:value="0" calcext:value-type="float">
            <text:p>0.00</text:p>
          </table:table-cell>
          <table:table-cell table:style-name="ce373" table:formula="of:=IF([.A252]=0;0;(PMT([.$C$3];[.$C$4];-[.$C$2])))" office:value-type="float" office:value="0" calcext:value-type="float">
            <text:p>0.00</text:p>
          </table:table-cell>
          <table:table-cell table:style-name="ce373" table:formula="of:=IF([.A252]=0;0;([.$C$2]-[.F252]))" office:value-type="float" office:value="0" calcext:value-type="float">
            <text:p>0.00</text:p>
          </table:table-cell>
          <table:table-cell table:style-name="ce373" table:formula="of:=IF([.A252]=0;0;([.B252]+[.F25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2]&gt;=[.$C$4];0;IF([.A252]=0;0;(1+[.A252])))" office:value-type="float" office:value="0" calcext:value-type="float">
            <text:p>0</text:p>
          </table:table-cell>
          <table:table-cell table:style-name="ce373" table:formula="of:=IF([.A253]=0;0;(PPMT([.$C$3];[.A253];[.$C$4];-[.$C$2])))" office:value-type="float" office:value="0" calcext:value-type="float">
            <text:p>0.00</text:p>
          </table:table-cell>
          <table:table-cell table:style-name="ce373" table:formula="of:=IF([.A253]=0;0;(IPMT([.$C$3];[.A253];[.$C$4];-[.$C$2])))" office:value-type="float" office:value="0" calcext:value-type="float">
            <text:p>0.00</text:p>
          </table:table-cell>
          <table:table-cell table:style-name="ce373" table:formula="of:=IF([.A253]=0;0;(PMT([.$C$3];[.$C$4];-[.$C$2])))" office:value-type="float" office:value="0" calcext:value-type="float">
            <text:p>0.00</text:p>
          </table:table-cell>
          <table:table-cell table:style-name="ce373" table:formula="of:=IF([.A253]=0;0;([.$C$2]-[.F253]))" office:value-type="float" office:value="0" calcext:value-type="float">
            <text:p>0.00</text:p>
          </table:table-cell>
          <table:table-cell table:style-name="ce373" table:formula="of:=IF([.A253]=0;0;([.B253]+[.F25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3]&gt;=[.$C$4];0;IF([.A253]=0;0;(1+[.A253])))" office:value-type="float" office:value="0" calcext:value-type="float">
            <text:p>0</text:p>
          </table:table-cell>
          <table:table-cell table:style-name="ce373" table:formula="of:=IF([.A254]=0;0;(PPMT([.$C$3];[.A254];[.$C$4];-[.$C$2])))" office:value-type="float" office:value="0" calcext:value-type="float">
            <text:p>0.00</text:p>
          </table:table-cell>
          <table:table-cell table:style-name="ce373" table:formula="of:=IF([.A254]=0;0;(IPMT([.$C$3];[.A254];[.$C$4];-[.$C$2])))" office:value-type="float" office:value="0" calcext:value-type="float">
            <text:p>0.00</text:p>
          </table:table-cell>
          <table:table-cell table:style-name="ce373" table:formula="of:=IF([.A254]=0;0;(PMT([.$C$3];[.$C$4];-[.$C$2])))" office:value-type="float" office:value="0" calcext:value-type="float">
            <text:p>0.00</text:p>
          </table:table-cell>
          <table:table-cell table:style-name="ce373" table:formula="of:=IF([.A254]=0;0;([.$C$2]-[.F254]))" office:value-type="float" office:value="0" calcext:value-type="float">
            <text:p>0.00</text:p>
          </table:table-cell>
          <table:table-cell table:style-name="ce373" table:formula="of:=IF([.A254]=0;0;([.B254]+[.F25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4]&gt;=[.$C$4];0;IF([.A254]=0;0;(1+[.A254])))" office:value-type="float" office:value="0" calcext:value-type="float">
            <text:p>0</text:p>
          </table:table-cell>
          <table:table-cell table:style-name="ce373" table:formula="of:=IF([.A255]=0;0;(PPMT([.$C$3];[.A255];[.$C$4];-[.$C$2])))" office:value-type="float" office:value="0" calcext:value-type="float">
            <text:p>0.00</text:p>
          </table:table-cell>
          <table:table-cell table:style-name="ce373" table:formula="of:=IF([.A255]=0;0;(IPMT([.$C$3];[.A255];[.$C$4];-[.$C$2])))" office:value-type="float" office:value="0" calcext:value-type="float">
            <text:p>0.00</text:p>
          </table:table-cell>
          <table:table-cell table:style-name="ce373" table:formula="of:=IF([.A255]=0;0;(PMT([.$C$3];[.$C$4];-[.$C$2])))" office:value-type="float" office:value="0" calcext:value-type="float">
            <text:p>0.00</text:p>
          </table:table-cell>
          <table:table-cell table:style-name="ce373" table:formula="of:=IF([.A255]=0;0;([.$C$2]-[.F255]))" office:value-type="float" office:value="0" calcext:value-type="float">
            <text:p>0.00</text:p>
          </table:table-cell>
          <table:table-cell table:style-name="ce373" table:formula="of:=IF([.A255]=0;0;([.B255]+[.F25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5]&gt;=[.$C$4];0;IF([.A255]=0;0;(1+[.A255])))" office:value-type="float" office:value="0" calcext:value-type="float">
            <text:p>0</text:p>
          </table:table-cell>
          <table:table-cell table:style-name="ce373" table:formula="of:=IF([.A256]=0;0;(PPMT([.$C$3];[.A256];[.$C$4];-[.$C$2])))" office:value-type="float" office:value="0" calcext:value-type="float">
            <text:p>0.00</text:p>
          </table:table-cell>
          <table:table-cell table:style-name="ce373" table:formula="of:=IF([.A256]=0;0;(IPMT([.$C$3];[.A256];[.$C$4];-[.$C$2])))" office:value-type="float" office:value="0" calcext:value-type="float">
            <text:p>0.00</text:p>
          </table:table-cell>
          <table:table-cell table:style-name="ce373" table:formula="of:=IF([.A256]=0;0;(PMT([.$C$3];[.$C$4];-[.$C$2])))" office:value-type="float" office:value="0" calcext:value-type="float">
            <text:p>0.00</text:p>
          </table:table-cell>
          <table:table-cell table:style-name="ce373" table:formula="of:=IF([.A256]=0;0;([.$C$2]-[.F256]))" office:value-type="float" office:value="0" calcext:value-type="float">
            <text:p>0.00</text:p>
          </table:table-cell>
          <table:table-cell table:style-name="ce373" table:formula="of:=IF([.A256]=0;0;([.B256]+[.F25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6]&gt;=[.$C$4];0;IF([.A256]=0;0;(1+[.A256])))" office:value-type="float" office:value="0" calcext:value-type="float">
            <text:p>0</text:p>
          </table:table-cell>
          <table:table-cell table:style-name="ce373" table:formula="of:=IF([.A257]=0;0;(PPMT([.$C$3];[.A257];[.$C$4];-[.$C$2])))" office:value-type="float" office:value="0" calcext:value-type="float">
            <text:p>0.00</text:p>
          </table:table-cell>
          <table:table-cell table:style-name="ce373" table:formula="of:=IF([.A257]=0;0;(IPMT([.$C$3];[.A257];[.$C$4];-[.$C$2])))" office:value-type="float" office:value="0" calcext:value-type="float">
            <text:p>0.00</text:p>
          </table:table-cell>
          <table:table-cell table:style-name="ce373" table:formula="of:=IF([.A257]=0;0;(PMT([.$C$3];[.$C$4];-[.$C$2])))" office:value-type="float" office:value="0" calcext:value-type="float">
            <text:p>0.00</text:p>
          </table:table-cell>
          <table:table-cell table:style-name="ce373" table:formula="of:=IF([.A257]=0;0;([.$C$2]-[.F257]))" office:value-type="float" office:value="0" calcext:value-type="float">
            <text:p>0.00</text:p>
          </table:table-cell>
          <table:table-cell table:style-name="ce373" table:formula="of:=IF([.A257]=0;0;([.B257]+[.F25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7]&gt;=[.$C$4];0;IF([.A257]=0;0;(1+[.A257])))" office:value-type="float" office:value="0" calcext:value-type="float">
            <text:p>0</text:p>
          </table:table-cell>
          <table:table-cell table:style-name="ce373" table:formula="of:=IF([.A258]=0;0;(PPMT([.$C$3];[.A258];[.$C$4];-[.$C$2])))" office:value-type="float" office:value="0" calcext:value-type="float">
            <text:p>0.00</text:p>
          </table:table-cell>
          <table:table-cell table:style-name="ce373" table:formula="of:=IF([.A258]=0;0;(IPMT([.$C$3];[.A258];[.$C$4];-[.$C$2])))" office:value-type="float" office:value="0" calcext:value-type="float">
            <text:p>0.00</text:p>
          </table:table-cell>
          <table:table-cell table:style-name="ce373" table:formula="of:=IF([.A258]=0;0;(PMT([.$C$3];[.$C$4];-[.$C$2])))" office:value-type="float" office:value="0" calcext:value-type="float">
            <text:p>0.00</text:p>
          </table:table-cell>
          <table:table-cell table:style-name="ce373" table:formula="of:=IF([.A258]=0;0;([.$C$2]-[.F258]))" office:value-type="float" office:value="0" calcext:value-type="float">
            <text:p>0.00</text:p>
          </table:table-cell>
          <table:table-cell table:style-name="ce373" table:formula="of:=IF([.A258]=0;0;([.B258]+[.F25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8]&gt;=[.$C$4];0;IF([.A258]=0;0;(1+[.A258])))" office:value-type="float" office:value="0" calcext:value-type="float">
            <text:p>0</text:p>
          </table:table-cell>
          <table:table-cell table:style-name="ce373" table:formula="of:=IF([.A259]=0;0;(PPMT([.$C$3];[.A259];[.$C$4];-[.$C$2])))" office:value-type="float" office:value="0" calcext:value-type="float">
            <text:p>0.00</text:p>
          </table:table-cell>
          <table:table-cell table:style-name="ce373" table:formula="of:=IF([.A259]=0;0;(IPMT([.$C$3];[.A259];[.$C$4];-[.$C$2])))" office:value-type="float" office:value="0" calcext:value-type="float">
            <text:p>0.00</text:p>
          </table:table-cell>
          <table:table-cell table:style-name="ce373" table:formula="of:=IF([.A259]=0;0;(PMT([.$C$3];[.$C$4];-[.$C$2])))" office:value-type="float" office:value="0" calcext:value-type="float">
            <text:p>0.00</text:p>
          </table:table-cell>
          <table:table-cell table:style-name="ce373" table:formula="of:=IF([.A259]=0;0;([.$C$2]-[.F259]))" office:value-type="float" office:value="0" calcext:value-type="float">
            <text:p>0.00</text:p>
          </table:table-cell>
          <table:table-cell table:style-name="ce373" table:formula="of:=IF([.A259]=0;0;([.B259]+[.F25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59]&gt;=[.$C$4];0;IF([.A259]=0;0;(1+[.A259])))" office:value-type="float" office:value="0" calcext:value-type="float">
            <text:p>0</text:p>
          </table:table-cell>
          <table:table-cell table:style-name="ce373" table:formula="of:=IF([.A260]=0;0;(PPMT([.$C$3];[.A260];[.$C$4];-[.$C$2])))" office:value-type="float" office:value="0" calcext:value-type="float">
            <text:p>0.00</text:p>
          </table:table-cell>
          <table:table-cell table:style-name="ce373" table:formula="of:=IF([.A260]=0;0;(IPMT([.$C$3];[.A260];[.$C$4];-[.$C$2])))" office:value-type="float" office:value="0" calcext:value-type="float">
            <text:p>0.00</text:p>
          </table:table-cell>
          <table:table-cell table:style-name="ce373" table:formula="of:=IF([.A260]=0;0;(PMT([.$C$3];[.$C$4];-[.$C$2])))" office:value-type="float" office:value="0" calcext:value-type="float">
            <text:p>0.00</text:p>
          </table:table-cell>
          <table:table-cell table:style-name="ce373" table:formula="of:=IF([.A260]=0;0;([.$C$2]-[.F260]))" office:value-type="float" office:value="0" calcext:value-type="float">
            <text:p>0.00</text:p>
          </table:table-cell>
          <table:table-cell table:style-name="ce373" table:formula="of:=IF([.A260]=0;0;([.B260]+[.F25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0]&gt;=[.$C$4];0;IF([.A260]=0;0;(1+[.A260])))" office:value-type="float" office:value="0" calcext:value-type="float">
            <text:p>0</text:p>
          </table:table-cell>
          <table:table-cell table:style-name="ce373" table:formula="of:=IF([.A261]=0;0;(PPMT([.$C$3];[.A261];[.$C$4];-[.$C$2])))" office:value-type="float" office:value="0" calcext:value-type="float">
            <text:p>0.00</text:p>
          </table:table-cell>
          <table:table-cell table:style-name="ce373" table:formula="of:=IF([.A261]=0;0;(IPMT([.$C$3];[.A261];[.$C$4];-[.$C$2])))" office:value-type="float" office:value="0" calcext:value-type="float">
            <text:p>0.00</text:p>
          </table:table-cell>
          <table:table-cell table:style-name="ce373" table:formula="of:=IF([.A261]=0;0;(PMT([.$C$3];[.$C$4];-[.$C$2])))" office:value-type="float" office:value="0" calcext:value-type="float">
            <text:p>0.00</text:p>
          </table:table-cell>
          <table:table-cell table:style-name="ce373" table:formula="of:=IF([.A261]=0;0;([.$C$2]-[.F261]))" office:value-type="float" office:value="0" calcext:value-type="float">
            <text:p>0.00</text:p>
          </table:table-cell>
          <table:table-cell table:style-name="ce373" table:formula="of:=IF([.A261]=0;0;([.B261]+[.F26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1]&gt;=[.$C$4];0;IF([.A261]=0;0;(1+[.A261])))" office:value-type="float" office:value="0" calcext:value-type="float">
            <text:p>0</text:p>
          </table:table-cell>
          <table:table-cell table:style-name="ce373" table:formula="of:=IF([.A262]=0;0;(PPMT([.$C$3];[.A262];[.$C$4];-[.$C$2])))" office:value-type="float" office:value="0" calcext:value-type="float">
            <text:p>0.00</text:p>
          </table:table-cell>
          <table:table-cell table:style-name="ce373" table:formula="of:=IF([.A262]=0;0;(IPMT([.$C$3];[.A262];[.$C$4];-[.$C$2])))" office:value-type="float" office:value="0" calcext:value-type="float">
            <text:p>0.00</text:p>
          </table:table-cell>
          <table:table-cell table:style-name="ce373" table:formula="of:=IF([.A262]=0;0;(PMT([.$C$3];[.$C$4];-[.$C$2])))" office:value-type="float" office:value="0" calcext:value-type="float">
            <text:p>0.00</text:p>
          </table:table-cell>
          <table:table-cell table:style-name="ce373" table:formula="of:=IF([.A262]=0;0;([.$C$2]-[.F262]))" office:value-type="float" office:value="0" calcext:value-type="float">
            <text:p>0.00</text:p>
          </table:table-cell>
          <table:table-cell table:style-name="ce373" table:formula="of:=IF([.A262]=0;0;([.B262]+[.F26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2]&gt;=[.$C$4];0;IF([.A262]=0;0;(1+[.A262])))" office:value-type="float" office:value="0" calcext:value-type="float">
            <text:p>0</text:p>
          </table:table-cell>
          <table:table-cell table:style-name="ce373" table:formula="of:=IF([.A263]=0;0;(PPMT([.$C$3];[.A263];[.$C$4];-[.$C$2])))" office:value-type="float" office:value="0" calcext:value-type="float">
            <text:p>0.00</text:p>
          </table:table-cell>
          <table:table-cell table:style-name="ce373" table:formula="of:=IF([.A263]=0;0;(IPMT([.$C$3];[.A263];[.$C$4];-[.$C$2])))" office:value-type="float" office:value="0" calcext:value-type="float">
            <text:p>0.00</text:p>
          </table:table-cell>
          <table:table-cell table:style-name="ce373" table:formula="of:=IF([.A263]=0;0;(PMT([.$C$3];[.$C$4];-[.$C$2])))" office:value-type="float" office:value="0" calcext:value-type="float">
            <text:p>0.00</text:p>
          </table:table-cell>
          <table:table-cell table:style-name="ce373" table:formula="of:=IF([.A263]=0;0;([.$C$2]-[.F263]))" office:value-type="float" office:value="0" calcext:value-type="float">
            <text:p>0.00</text:p>
          </table:table-cell>
          <table:table-cell table:style-name="ce373" table:formula="of:=IF([.A263]=0;0;([.B263]+[.F26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3]&gt;=[.$C$4];0;IF([.A263]=0;0;(1+[.A263])))" office:value-type="float" office:value="0" calcext:value-type="float">
            <text:p>0</text:p>
          </table:table-cell>
          <table:table-cell table:style-name="ce373" table:formula="of:=IF([.A264]=0;0;(PPMT([.$C$3];[.A264];[.$C$4];-[.$C$2])))" office:value-type="float" office:value="0" calcext:value-type="float">
            <text:p>0.00</text:p>
          </table:table-cell>
          <table:table-cell table:style-name="ce373" table:formula="of:=IF([.A264]=0;0;(IPMT([.$C$3];[.A264];[.$C$4];-[.$C$2])))" office:value-type="float" office:value="0" calcext:value-type="float">
            <text:p>0.00</text:p>
          </table:table-cell>
          <table:table-cell table:style-name="ce373" table:formula="of:=IF([.A264]=0;0;(PMT([.$C$3];[.$C$4];-[.$C$2])))" office:value-type="float" office:value="0" calcext:value-type="float">
            <text:p>0.00</text:p>
          </table:table-cell>
          <table:table-cell table:style-name="ce373" table:formula="of:=IF([.A264]=0;0;([.$C$2]-[.F264]))" office:value-type="float" office:value="0" calcext:value-type="float">
            <text:p>0.00</text:p>
          </table:table-cell>
          <table:table-cell table:style-name="ce373" table:formula="of:=IF([.A264]=0;0;([.B264]+[.F26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4]&gt;=[.$C$4];0;IF([.A264]=0;0;(1+[.A264])))" office:value-type="float" office:value="0" calcext:value-type="float">
            <text:p>0</text:p>
          </table:table-cell>
          <table:table-cell table:style-name="ce373" table:formula="of:=IF([.A265]=0;0;(PPMT([.$C$3];[.A265];[.$C$4];-[.$C$2])))" office:value-type="float" office:value="0" calcext:value-type="float">
            <text:p>0.00</text:p>
          </table:table-cell>
          <table:table-cell table:style-name="ce373" table:formula="of:=IF([.A265]=0;0;(IPMT([.$C$3];[.A265];[.$C$4];-[.$C$2])))" office:value-type="float" office:value="0" calcext:value-type="float">
            <text:p>0.00</text:p>
          </table:table-cell>
          <table:table-cell table:style-name="ce373" table:formula="of:=IF([.A265]=0;0;(PMT([.$C$3];[.$C$4];-[.$C$2])))" office:value-type="float" office:value="0" calcext:value-type="float">
            <text:p>0.00</text:p>
          </table:table-cell>
          <table:table-cell table:style-name="ce373" table:formula="of:=IF([.A265]=0;0;([.$C$2]-[.F265]))" office:value-type="float" office:value="0" calcext:value-type="float">
            <text:p>0.00</text:p>
          </table:table-cell>
          <table:table-cell table:style-name="ce373" table:formula="of:=IF([.A265]=0;0;([.B265]+[.F26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5]&gt;=[.$C$4];0;IF([.A265]=0;0;(1+[.A265])))" office:value-type="float" office:value="0" calcext:value-type="float">
            <text:p>0</text:p>
          </table:table-cell>
          <table:table-cell table:style-name="ce373" table:formula="of:=IF([.A266]=0;0;(PPMT([.$C$3];[.A266];[.$C$4];-[.$C$2])))" office:value-type="float" office:value="0" calcext:value-type="float">
            <text:p>0.00</text:p>
          </table:table-cell>
          <table:table-cell table:style-name="ce373" table:formula="of:=IF([.A266]=0;0;(IPMT([.$C$3];[.A266];[.$C$4];-[.$C$2])))" office:value-type="float" office:value="0" calcext:value-type="float">
            <text:p>0.00</text:p>
          </table:table-cell>
          <table:table-cell table:style-name="ce373" table:formula="of:=IF([.A266]=0;0;(PMT([.$C$3];[.$C$4];-[.$C$2])))" office:value-type="float" office:value="0" calcext:value-type="float">
            <text:p>0.00</text:p>
          </table:table-cell>
          <table:table-cell table:style-name="ce373" table:formula="of:=IF([.A266]=0;0;([.$C$2]-[.F266]))" office:value-type="float" office:value="0" calcext:value-type="float">
            <text:p>0.00</text:p>
          </table:table-cell>
          <table:table-cell table:style-name="ce373" table:formula="of:=IF([.A266]=0;0;([.B266]+[.F26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6]&gt;=[.$C$4];0;IF([.A266]=0;0;(1+[.A266])))" office:value-type="float" office:value="0" calcext:value-type="float">
            <text:p>0</text:p>
          </table:table-cell>
          <table:table-cell table:style-name="ce373" table:formula="of:=IF([.A267]=0;0;(PPMT([.$C$3];[.A267];[.$C$4];-[.$C$2])))" office:value-type="float" office:value="0" calcext:value-type="float">
            <text:p>0.00</text:p>
          </table:table-cell>
          <table:table-cell table:style-name="ce373" table:formula="of:=IF([.A267]=0;0;(IPMT([.$C$3];[.A267];[.$C$4];-[.$C$2])))" office:value-type="float" office:value="0" calcext:value-type="float">
            <text:p>0.00</text:p>
          </table:table-cell>
          <table:table-cell table:style-name="ce373" table:formula="of:=IF([.A267]=0;0;(PMT([.$C$3];[.$C$4];-[.$C$2])))" office:value-type="float" office:value="0" calcext:value-type="float">
            <text:p>0.00</text:p>
          </table:table-cell>
          <table:table-cell table:style-name="ce373" table:formula="of:=IF([.A267]=0;0;([.$C$2]-[.F267]))" office:value-type="float" office:value="0" calcext:value-type="float">
            <text:p>0.00</text:p>
          </table:table-cell>
          <table:table-cell table:style-name="ce373" table:formula="of:=IF([.A267]=0;0;([.B267]+[.F26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7]&gt;=[.$C$4];0;IF([.A267]=0;0;(1+[.A267])))" office:value-type="float" office:value="0" calcext:value-type="float">
            <text:p>0</text:p>
          </table:table-cell>
          <table:table-cell table:style-name="ce373" table:formula="of:=IF([.A268]=0;0;(PPMT([.$C$3];[.A268];[.$C$4];-[.$C$2])))" office:value-type="float" office:value="0" calcext:value-type="float">
            <text:p>0.00</text:p>
          </table:table-cell>
          <table:table-cell table:style-name="ce373" table:formula="of:=IF([.A268]=0;0;(IPMT([.$C$3];[.A268];[.$C$4];-[.$C$2])))" office:value-type="float" office:value="0" calcext:value-type="float">
            <text:p>0.00</text:p>
          </table:table-cell>
          <table:table-cell table:style-name="ce373" table:formula="of:=IF([.A268]=0;0;(PMT([.$C$3];[.$C$4];-[.$C$2])))" office:value-type="float" office:value="0" calcext:value-type="float">
            <text:p>0.00</text:p>
          </table:table-cell>
          <table:table-cell table:style-name="ce373" table:formula="of:=IF([.A268]=0;0;([.$C$2]-[.F268]))" office:value-type="float" office:value="0" calcext:value-type="float">
            <text:p>0.00</text:p>
          </table:table-cell>
          <table:table-cell table:style-name="ce373" table:formula="of:=IF([.A268]=0;0;([.B268]+[.F26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8]&gt;=[.$C$4];0;IF([.A268]=0;0;(1+[.A268])))" office:value-type="float" office:value="0" calcext:value-type="float">
            <text:p>0</text:p>
          </table:table-cell>
          <table:table-cell table:style-name="ce373" table:formula="of:=IF([.A269]=0;0;(PPMT([.$C$3];[.A269];[.$C$4];-[.$C$2])))" office:value-type="float" office:value="0" calcext:value-type="float">
            <text:p>0.00</text:p>
          </table:table-cell>
          <table:table-cell table:style-name="ce373" table:formula="of:=IF([.A269]=0;0;(IPMT([.$C$3];[.A269];[.$C$4];-[.$C$2])))" office:value-type="float" office:value="0" calcext:value-type="float">
            <text:p>0.00</text:p>
          </table:table-cell>
          <table:table-cell table:style-name="ce373" table:formula="of:=IF([.A269]=0;0;(PMT([.$C$3];[.$C$4];-[.$C$2])))" office:value-type="float" office:value="0" calcext:value-type="float">
            <text:p>0.00</text:p>
          </table:table-cell>
          <table:table-cell table:style-name="ce373" table:formula="of:=IF([.A269]=0;0;([.$C$2]-[.F269]))" office:value-type="float" office:value="0" calcext:value-type="float">
            <text:p>0.00</text:p>
          </table:table-cell>
          <table:table-cell table:style-name="ce373" table:formula="of:=IF([.A269]=0;0;([.B269]+[.F26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69]&gt;=[.$C$4];0;IF([.A269]=0;0;(1+[.A269])))" office:value-type="float" office:value="0" calcext:value-type="float">
            <text:p>0</text:p>
          </table:table-cell>
          <table:table-cell table:style-name="ce373" table:formula="of:=IF([.A270]=0;0;(PPMT([.$C$3];[.A270];[.$C$4];-[.$C$2])))" office:value-type="float" office:value="0" calcext:value-type="float">
            <text:p>0.00</text:p>
          </table:table-cell>
          <table:table-cell table:style-name="ce373" table:formula="of:=IF([.A270]=0;0;(IPMT([.$C$3];[.A270];[.$C$4];-[.$C$2])))" office:value-type="float" office:value="0" calcext:value-type="float">
            <text:p>0.00</text:p>
          </table:table-cell>
          <table:table-cell table:style-name="ce373" table:formula="of:=IF([.A270]=0;0;(PMT([.$C$3];[.$C$4];-[.$C$2])))" office:value-type="float" office:value="0" calcext:value-type="float">
            <text:p>0.00</text:p>
          </table:table-cell>
          <table:table-cell table:style-name="ce373" table:formula="of:=IF([.A270]=0;0;([.$C$2]-[.F270]))" office:value-type="float" office:value="0" calcext:value-type="float">
            <text:p>0.00</text:p>
          </table:table-cell>
          <table:table-cell table:style-name="ce373" table:formula="of:=IF([.A270]=0;0;([.B270]+[.F26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0]&gt;=[.$C$4];0;IF([.A270]=0;0;(1+[.A270])))" office:value-type="float" office:value="0" calcext:value-type="float">
            <text:p>0</text:p>
          </table:table-cell>
          <table:table-cell table:style-name="ce373" table:formula="of:=IF([.A271]=0;0;(PPMT([.$C$3];[.A271];[.$C$4];-[.$C$2])))" office:value-type="float" office:value="0" calcext:value-type="float">
            <text:p>0.00</text:p>
          </table:table-cell>
          <table:table-cell table:style-name="ce373" table:formula="of:=IF([.A271]=0;0;(IPMT([.$C$3];[.A271];[.$C$4];-[.$C$2])))" office:value-type="float" office:value="0" calcext:value-type="float">
            <text:p>0.00</text:p>
          </table:table-cell>
          <table:table-cell table:style-name="ce373" table:formula="of:=IF([.A271]=0;0;(PMT([.$C$3];[.$C$4];-[.$C$2])))" office:value-type="float" office:value="0" calcext:value-type="float">
            <text:p>0.00</text:p>
          </table:table-cell>
          <table:table-cell table:style-name="ce373" table:formula="of:=IF([.A271]=0;0;([.$C$2]-[.F271]))" office:value-type="float" office:value="0" calcext:value-type="float">
            <text:p>0.00</text:p>
          </table:table-cell>
          <table:table-cell table:style-name="ce373" table:formula="of:=IF([.A271]=0;0;([.B271]+[.F27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1]&gt;=[.$C$4];0;IF([.A271]=0;0;(1+[.A271])))" office:value-type="float" office:value="0" calcext:value-type="float">
            <text:p>0</text:p>
          </table:table-cell>
          <table:table-cell table:style-name="ce373" table:formula="of:=IF([.A272]=0;0;(PPMT([.$C$3];[.A272];[.$C$4];-[.$C$2])))" office:value-type="float" office:value="0" calcext:value-type="float">
            <text:p>0.00</text:p>
          </table:table-cell>
          <table:table-cell table:style-name="ce373" table:formula="of:=IF([.A272]=0;0;(IPMT([.$C$3];[.A272];[.$C$4];-[.$C$2])))" office:value-type="float" office:value="0" calcext:value-type="float">
            <text:p>0.00</text:p>
          </table:table-cell>
          <table:table-cell table:style-name="ce373" table:formula="of:=IF([.A272]=0;0;(PMT([.$C$3];[.$C$4];-[.$C$2])))" office:value-type="float" office:value="0" calcext:value-type="float">
            <text:p>0.00</text:p>
          </table:table-cell>
          <table:table-cell table:style-name="ce373" table:formula="of:=IF([.A272]=0;0;([.$C$2]-[.F272]))" office:value-type="float" office:value="0" calcext:value-type="float">
            <text:p>0.00</text:p>
          </table:table-cell>
          <table:table-cell table:style-name="ce373" table:formula="of:=IF([.A272]=0;0;([.B272]+[.F27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2]&gt;=[.$C$4];0;IF([.A272]=0;0;(1+[.A272])))" office:value-type="float" office:value="0" calcext:value-type="float">
            <text:p>0</text:p>
          </table:table-cell>
          <table:table-cell table:style-name="ce373" table:formula="of:=IF([.A273]=0;0;(PPMT([.$C$3];[.A273];[.$C$4];-[.$C$2])))" office:value-type="float" office:value="0" calcext:value-type="float">
            <text:p>0.00</text:p>
          </table:table-cell>
          <table:table-cell table:style-name="ce373" table:formula="of:=IF([.A273]=0;0;(IPMT([.$C$3];[.A273];[.$C$4];-[.$C$2])))" office:value-type="float" office:value="0" calcext:value-type="float">
            <text:p>0.00</text:p>
          </table:table-cell>
          <table:table-cell table:style-name="ce373" table:formula="of:=IF([.A273]=0;0;(PMT([.$C$3];[.$C$4];-[.$C$2])))" office:value-type="float" office:value="0" calcext:value-type="float">
            <text:p>0.00</text:p>
          </table:table-cell>
          <table:table-cell table:style-name="ce373" table:formula="of:=IF([.A273]=0;0;([.$C$2]-[.F273]))" office:value-type="float" office:value="0" calcext:value-type="float">
            <text:p>0.00</text:p>
          </table:table-cell>
          <table:table-cell table:style-name="ce373" table:formula="of:=IF([.A273]=0;0;([.B273]+[.F27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3]&gt;=[.$C$4];0;IF([.A273]=0;0;(1+[.A273])))" office:value-type="float" office:value="0" calcext:value-type="float">
            <text:p>0</text:p>
          </table:table-cell>
          <table:table-cell table:style-name="ce373" table:formula="of:=IF([.A274]=0;0;(PPMT([.$C$3];[.A274];[.$C$4];-[.$C$2])))" office:value-type="float" office:value="0" calcext:value-type="float">
            <text:p>0.00</text:p>
          </table:table-cell>
          <table:table-cell table:style-name="ce373" table:formula="of:=IF([.A274]=0;0;(IPMT([.$C$3];[.A274];[.$C$4];-[.$C$2])))" office:value-type="float" office:value="0" calcext:value-type="float">
            <text:p>0.00</text:p>
          </table:table-cell>
          <table:table-cell table:style-name="ce373" table:formula="of:=IF([.A274]=0;0;(PMT([.$C$3];[.$C$4];-[.$C$2])))" office:value-type="float" office:value="0" calcext:value-type="float">
            <text:p>0.00</text:p>
          </table:table-cell>
          <table:table-cell table:style-name="ce373" table:formula="of:=IF([.A274]=0;0;([.$C$2]-[.F274]))" office:value-type="float" office:value="0" calcext:value-type="float">
            <text:p>0.00</text:p>
          </table:table-cell>
          <table:table-cell table:style-name="ce373" table:formula="of:=IF([.A274]=0;0;([.B274]+[.F27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4]&gt;=[.$C$4];0;IF([.A274]=0;0;(1+[.A274])))" office:value-type="float" office:value="0" calcext:value-type="float">
            <text:p>0</text:p>
          </table:table-cell>
          <table:table-cell table:style-name="ce373" table:formula="of:=IF([.A275]=0;0;(PPMT([.$C$3];[.A275];[.$C$4];-[.$C$2])))" office:value-type="float" office:value="0" calcext:value-type="float">
            <text:p>0.00</text:p>
          </table:table-cell>
          <table:table-cell table:style-name="ce373" table:formula="of:=IF([.A275]=0;0;(IPMT([.$C$3];[.A275];[.$C$4];-[.$C$2])))" office:value-type="float" office:value="0" calcext:value-type="float">
            <text:p>0.00</text:p>
          </table:table-cell>
          <table:table-cell table:style-name="ce373" table:formula="of:=IF([.A275]=0;0;(PMT([.$C$3];[.$C$4];-[.$C$2])))" office:value-type="float" office:value="0" calcext:value-type="float">
            <text:p>0.00</text:p>
          </table:table-cell>
          <table:table-cell table:style-name="ce373" table:formula="of:=IF([.A275]=0;0;([.$C$2]-[.F275]))" office:value-type="float" office:value="0" calcext:value-type="float">
            <text:p>0.00</text:p>
          </table:table-cell>
          <table:table-cell table:style-name="ce373" table:formula="of:=IF([.A275]=0;0;([.B275]+[.F27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5]&gt;=[.$C$4];0;IF([.A275]=0;0;(1+[.A275])))" office:value-type="float" office:value="0" calcext:value-type="float">
            <text:p>0</text:p>
          </table:table-cell>
          <table:table-cell table:style-name="ce373" table:formula="of:=IF([.A276]=0;0;(PPMT([.$C$3];[.A276];[.$C$4];-[.$C$2])))" office:value-type="float" office:value="0" calcext:value-type="float">
            <text:p>0.00</text:p>
          </table:table-cell>
          <table:table-cell table:style-name="ce373" table:formula="of:=IF([.A276]=0;0;(IPMT([.$C$3];[.A276];[.$C$4];-[.$C$2])))" office:value-type="float" office:value="0" calcext:value-type="float">
            <text:p>0.00</text:p>
          </table:table-cell>
          <table:table-cell table:style-name="ce373" table:formula="of:=IF([.A276]=0;0;(PMT([.$C$3];[.$C$4];-[.$C$2])))" office:value-type="float" office:value="0" calcext:value-type="float">
            <text:p>0.00</text:p>
          </table:table-cell>
          <table:table-cell table:style-name="ce373" table:formula="of:=IF([.A276]=0;0;([.$C$2]-[.F276]))" office:value-type="float" office:value="0" calcext:value-type="float">
            <text:p>0.00</text:p>
          </table:table-cell>
          <table:table-cell table:style-name="ce373" table:formula="of:=IF([.A276]=0;0;([.B276]+[.F27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6]&gt;=[.$C$4];0;IF([.A276]=0;0;(1+[.A276])))" office:value-type="float" office:value="0" calcext:value-type="float">
            <text:p>0</text:p>
          </table:table-cell>
          <table:table-cell table:style-name="ce373" table:formula="of:=IF([.A277]=0;0;(PPMT([.$C$3];[.A277];[.$C$4];-[.$C$2])))" office:value-type="float" office:value="0" calcext:value-type="float">
            <text:p>0.00</text:p>
          </table:table-cell>
          <table:table-cell table:style-name="ce373" table:formula="of:=IF([.A277]=0;0;(IPMT([.$C$3];[.A277];[.$C$4];-[.$C$2])))" office:value-type="float" office:value="0" calcext:value-type="float">
            <text:p>0.00</text:p>
          </table:table-cell>
          <table:table-cell table:style-name="ce373" table:formula="of:=IF([.A277]=0;0;(PMT([.$C$3];[.$C$4];-[.$C$2])))" office:value-type="float" office:value="0" calcext:value-type="float">
            <text:p>0.00</text:p>
          </table:table-cell>
          <table:table-cell table:style-name="ce373" table:formula="of:=IF([.A277]=0;0;([.$C$2]-[.F277]))" office:value-type="float" office:value="0" calcext:value-type="float">
            <text:p>0.00</text:p>
          </table:table-cell>
          <table:table-cell table:style-name="ce373" table:formula="of:=IF([.A277]=0;0;([.B277]+[.F27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7]&gt;=[.$C$4];0;IF([.A277]=0;0;(1+[.A277])))" office:value-type="float" office:value="0" calcext:value-type="float">
            <text:p>0</text:p>
          </table:table-cell>
          <table:table-cell table:style-name="ce373" table:formula="of:=IF([.A278]=0;0;(PPMT([.$C$3];[.A278];[.$C$4];-[.$C$2])))" office:value-type="float" office:value="0" calcext:value-type="float">
            <text:p>0.00</text:p>
          </table:table-cell>
          <table:table-cell table:style-name="ce373" table:formula="of:=IF([.A278]=0;0;(IPMT([.$C$3];[.A278];[.$C$4];-[.$C$2])))" office:value-type="float" office:value="0" calcext:value-type="float">
            <text:p>0.00</text:p>
          </table:table-cell>
          <table:table-cell table:style-name="ce373" table:formula="of:=IF([.A278]=0;0;(PMT([.$C$3];[.$C$4];-[.$C$2])))" office:value-type="float" office:value="0" calcext:value-type="float">
            <text:p>0.00</text:p>
          </table:table-cell>
          <table:table-cell table:style-name="ce373" table:formula="of:=IF([.A278]=0;0;([.$C$2]-[.F278]))" office:value-type="float" office:value="0" calcext:value-type="float">
            <text:p>0.00</text:p>
          </table:table-cell>
          <table:table-cell table:style-name="ce373" table:formula="of:=IF([.A278]=0;0;([.B278]+[.F27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8]&gt;=[.$C$4];0;IF([.A278]=0;0;(1+[.A278])))" office:value-type="float" office:value="0" calcext:value-type="float">
            <text:p>0</text:p>
          </table:table-cell>
          <table:table-cell table:style-name="ce373" table:formula="of:=IF([.A279]=0;0;(PPMT([.$C$3];[.A279];[.$C$4];-[.$C$2])))" office:value-type="float" office:value="0" calcext:value-type="float">
            <text:p>0.00</text:p>
          </table:table-cell>
          <table:table-cell table:style-name="ce373" table:formula="of:=IF([.A279]=0;0;(IPMT([.$C$3];[.A279];[.$C$4];-[.$C$2])))" office:value-type="float" office:value="0" calcext:value-type="float">
            <text:p>0.00</text:p>
          </table:table-cell>
          <table:table-cell table:style-name="ce373" table:formula="of:=IF([.A279]=0;0;(PMT([.$C$3];[.$C$4];-[.$C$2])))" office:value-type="float" office:value="0" calcext:value-type="float">
            <text:p>0.00</text:p>
          </table:table-cell>
          <table:table-cell table:style-name="ce373" table:formula="of:=IF([.A279]=0;0;([.$C$2]-[.F279]))" office:value-type="float" office:value="0" calcext:value-type="float">
            <text:p>0.00</text:p>
          </table:table-cell>
          <table:table-cell table:style-name="ce373" table:formula="of:=IF([.A279]=0;0;([.B279]+[.F27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79]&gt;=[.$C$4];0;IF([.A279]=0;0;(1+[.A279])))" office:value-type="float" office:value="0" calcext:value-type="float">
            <text:p>0</text:p>
          </table:table-cell>
          <table:table-cell table:style-name="ce373" table:formula="of:=IF([.A280]=0;0;(PPMT([.$C$3];[.A280];[.$C$4];-[.$C$2])))" office:value-type="float" office:value="0" calcext:value-type="float">
            <text:p>0.00</text:p>
          </table:table-cell>
          <table:table-cell table:style-name="ce373" table:formula="of:=IF([.A280]=0;0;(IPMT([.$C$3];[.A280];[.$C$4];-[.$C$2])))" office:value-type="float" office:value="0" calcext:value-type="float">
            <text:p>0.00</text:p>
          </table:table-cell>
          <table:table-cell table:style-name="ce373" table:formula="of:=IF([.A280]=0;0;(PMT([.$C$3];[.$C$4];-[.$C$2])))" office:value-type="float" office:value="0" calcext:value-type="float">
            <text:p>0.00</text:p>
          </table:table-cell>
          <table:table-cell table:style-name="ce373" table:formula="of:=IF([.A280]=0;0;([.$C$2]-[.F280]))" office:value-type="float" office:value="0" calcext:value-type="float">
            <text:p>0.00</text:p>
          </table:table-cell>
          <table:table-cell table:style-name="ce373" table:formula="of:=IF([.A280]=0;0;([.B280]+[.F27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0]&gt;=[.$C$4];0;IF([.A280]=0;0;(1+[.A280])))" office:value-type="float" office:value="0" calcext:value-type="float">
            <text:p>0</text:p>
          </table:table-cell>
          <table:table-cell table:style-name="ce373" table:formula="of:=IF([.A281]=0;0;(PPMT([.$C$3];[.A281];[.$C$4];-[.$C$2])))" office:value-type="float" office:value="0" calcext:value-type="float">
            <text:p>0.00</text:p>
          </table:table-cell>
          <table:table-cell table:style-name="ce373" table:formula="of:=IF([.A281]=0;0;(IPMT([.$C$3];[.A281];[.$C$4];-[.$C$2])))" office:value-type="float" office:value="0" calcext:value-type="float">
            <text:p>0.00</text:p>
          </table:table-cell>
          <table:table-cell table:style-name="ce373" table:formula="of:=IF([.A281]=0;0;(PMT([.$C$3];[.$C$4];-[.$C$2])))" office:value-type="float" office:value="0" calcext:value-type="float">
            <text:p>0.00</text:p>
          </table:table-cell>
          <table:table-cell table:style-name="ce373" table:formula="of:=IF([.A281]=0;0;([.$C$2]-[.F281]))" office:value-type="float" office:value="0" calcext:value-type="float">
            <text:p>0.00</text:p>
          </table:table-cell>
          <table:table-cell table:style-name="ce373" table:formula="of:=IF([.A281]=0;0;([.B281]+[.F28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1]&gt;=[.$C$4];0;IF([.A281]=0;0;(1+[.A281])))" office:value-type="float" office:value="0" calcext:value-type="float">
            <text:p>0</text:p>
          </table:table-cell>
          <table:table-cell table:style-name="ce373" table:formula="of:=IF([.A282]=0;0;(PPMT([.$C$3];[.A282];[.$C$4];-[.$C$2])))" office:value-type="float" office:value="0" calcext:value-type="float">
            <text:p>0.00</text:p>
          </table:table-cell>
          <table:table-cell table:style-name="ce373" table:formula="of:=IF([.A282]=0;0;(IPMT([.$C$3];[.A282];[.$C$4];-[.$C$2])))" office:value-type="float" office:value="0" calcext:value-type="float">
            <text:p>0.00</text:p>
          </table:table-cell>
          <table:table-cell table:style-name="ce373" table:formula="of:=IF([.A282]=0;0;(PMT([.$C$3];[.$C$4];-[.$C$2])))" office:value-type="float" office:value="0" calcext:value-type="float">
            <text:p>0.00</text:p>
          </table:table-cell>
          <table:table-cell table:style-name="ce373" table:formula="of:=IF([.A282]=0;0;([.$C$2]-[.F282]))" office:value-type="float" office:value="0" calcext:value-type="float">
            <text:p>0.00</text:p>
          </table:table-cell>
          <table:table-cell table:style-name="ce373" table:formula="of:=IF([.A282]=0;0;([.B282]+[.F28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2]&gt;=[.$C$4];0;IF([.A282]=0;0;(1+[.A282])))" office:value-type="float" office:value="0" calcext:value-type="float">
            <text:p>0</text:p>
          </table:table-cell>
          <table:table-cell table:style-name="ce373" table:formula="of:=IF([.A283]=0;0;(PPMT([.$C$3];[.A283];[.$C$4];-[.$C$2])))" office:value-type="float" office:value="0" calcext:value-type="float">
            <text:p>0.00</text:p>
          </table:table-cell>
          <table:table-cell table:style-name="ce373" table:formula="of:=IF([.A283]=0;0;(IPMT([.$C$3];[.A283];[.$C$4];-[.$C$2])))" office:value-type="float" office:value="0" calcext:value-type="float">
            <text:p>0.00</text:p>
          </table:table-cell>
          <table:table-cell table:style-name="ce373" table:formula="of:=IF([.A283]=0;0;(PMT([.$C$3];[.$C$4];-[.$C$2])))" office:value-type="float" office:value="0" calcext:value-type="float">
            <text:p>0.00</text:p>
          </table:table-cell>
          <table:table-cell table:style-name="ce373" table:formula="of:=IF([.A283]=0;0;([.$C$2]-[.F283]))" office:value-type="float" office:value="0" calcext:value-type="float">
            <text:p>0.00</text:p>
          </table:table-cell>
          <table:table-cell table:style-name="ce373" table:formula="of:=IF([.A283]=0;0;([.B283]+[.F28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3]&gt;=[.$C$4];0;IF([.A283]=0;0;(1+[.A283])))" office:value-type="float" office:value="0" calcext:value-type="float">
            <text:p>0</text:p>
          </table:table-cell>
          <table:table-cell table:style-name="ce373" table:formula="of:=IF([.A284]=0;0;(PPMT([.$C$3];[.A284];[.$C$4];-[.$C$2])))" office:value-type="float" office:value="0" calcext:value-type="float">
            <text:p>0.00</text:p>
          </table:table-cell>
          <table:table-cell table:style-name="ce373" table:formula="of:=IF([.A284]=0;0;(IPMT([.$C$3];[.A284];[.$C$4];-[.$C$2])))" office:value-type="float" office:value="0" calcext:value-type="float">
            <text:p>0.00</text:p>
          </table:table-cell>
          <table:table-cell table:style-name="ce373" table:formula="of:=IF([.A284]=0;0;(PMT([.$C$3];[.$C$4];-[.$C$2])))" office:value-type="float" office:value="0" calcext:value-type="float">
            <text:p>0.00</text:p>
          </table:table-cell>
          <table:table-cell table:style-name="ce373" table:formula="of:=IF([.A284]=0;0;([.$C$2]-[.F284]))" office:value-type="float" office:value="0" calcext:value-type="float">
            <text:p>0.00</text:p>
          </table:table-cell>
          <table:table-cell table:style-name="ce373" table:formula="of:=IF([.A284]=0;0;([.B284]+[.F28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4]&gt;=[.$C$4];0;IF([.A284]=0;0;(1+[.A284])))" office:value-type="float" office:value="0" calcext:value-type="float">
            <text:p>0</text:p>
          </table:table-cell>
          <table:table-cell table:style-name="ce373" table:formula="of:=IF([.A285]=0;0;(PPMT([.$C$3];[.A285];[.$C$4];-[.$C$2])))" office:value-type="float" office:value="0" calcext:value-type="float">
            <text:p>0.00</text:p>
          </table:table-cell>
          <table:table-cell table:style-name="ce373" table:formula="of:=IF([.A285]=0;0;(IPMT([.$C$3];[.A285];[.$C$4];-[.$C$2])))" office:value-type="float" office:value="0" calcext:value-type="float">
            <text:p>0.00</text:p>
          </table:table-cell>
          <table:table-cell table:style-name="ce373" table:formula="of:=IF([.A285]=0;0;(PMT([.$C$3];[.$C$4];-[.$C$2])))" office:value-type="float" office:value="0" calcext:value-type="float">
            <text:p>0.00</text:p>
          </table:table-cell>
          <table:table-cell table:style-name="ce373" table:formula="of:=IF([.A285]=0;0;([.$C$2]-[.F285]))" office:value-type="float" office:value="0" calcext:value-type="float">
            <text:p>0.00</text:p>
          </table:table-cell>
          <table:table-cell table:style-name="ce373" table:formula="of:=IF([.A285]=0;0;([.B285]+[.F28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5]&gt;=[.$C$4];0;IF([.A285]=0;0;(1+[.A285])))" office:value-type="float" office:value="0" calcext:value-type="float">
            <text:p>0</text:p>
          </table:table-cell>
          <table:table-cell table:style-name="ce373" table:formula="of:=IF([.A286]=0;0;(PPMT([.$C$3];[.A286];[.$C$4];-[.$C$2])))" office:value-type="float" office:value="0" calcext:value-type="float">
            <text:p>0.00</text:p>
          </table:table-cell>
          <table:table-cell table:style-name="ce373" table:formula="of:=IF([.A286]=0;0;(IPMT([.$C$3];[.A286];[.$C$4];-[.$C$2])))" office:value-type="float" office:value="0" calcext:value-type="float">
            <text:p>0.00</text:p>
          </table:table-cell>
          <table:table-cell table:style-name="ce373" table:formula="of:=IF([.A286]=0;0;(PMT([.$C$3];[.$C$4];-[.$C$2])))" office:value-type="float" office:value="0" calcext:value-type="float">
            <text:p>0.00</text:p>
          </table:table-cell>
          <table:table-cell table:style-name="ce373" table:formula="of:=IF([.A286]=0;0;([.$C$2]-[.F286]))" office:value-type="float" office:value="0" calcext:value-type="float">
            <text:p>0.00</text:p>
          </table:table-cell>
          <table:table-cell table:style-name="ce373" table:formula="of:=IF([.A286]=0;0;([.B286]+[.F28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6]&gt;=[.$C$4];0;IF([.A286]=0;0;(1+[.A286])))" office:value-type="float" office:value="0" calcext:value-type="float">
            <text:p>0</text:p>
          </table:table-cell>
          <table:table-cell table:style-name="ce373" table:formula="of:=IF([.A287]=0;0;(PPMT([.$C$3];[.A287];[.$C$4];-[.$C$2])))" office:value-type="float" office:value="0" calcext:value-type="float">
            <text:p>0.00</text:p>
          </table:table-cell>
          <table:table-cell table:style-name="ce373" table:formula="of:=IF([.A287]=0;0;(IPMT([.$C$3];[.A287];[.$C$4];-[.$C$2])))" office:value-type="float" office:value="0" calcext:value-type="float">
            <text:p>0.00</text:p>
          </table:table-cell>
          <table:table-cell table:style-name="ce373" table:formula="of:=IF([.A287]=0;0;(PMT([.$C$3];[.$C$4];-[.$C$2])))" office:value-type="float" office:value="0" calcext:value-type="float">
            <text:p>0.00</text:p>
          </table:table-cell>
          <table:table-cell table:style-name="ce373" table:formula="of:=IF([.A287]=0;0;([.$C$2]-[.F287]))" office:value-type="float" office:value="0" calcext:value-type="float">
            <text:p>0.00</text:p>
          </table:table-cell>
          <table:table-cell table:style-name="ce373" table:formula="of:=IF([.A287]=0;0;([.B287]+[.F28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7]&gt;=[.$C$4];0;IF([.A287]=0;0;(1+[.A287])))" office:value-type="float" office:value="0" calcext:value-type="float">
            <text:p>0</text:p>
          </table:table-cell>
          <table:table-cell table:style-name="ce373" table:formula="of:=IF([.A288]=0;0;(PPMT([.$C$3];[.A288];[.$C$4];-[.$C$2])))" office:value-type="float" office:value="0" calcext:value-type="float">
            <text:p>0.00</text:p>
          </table:table-cell>
          <table:table-cell table:style-name="ce373" table:formula="of:=IF([.A288]=0;0;(IPMT([.$C$3];[.A288];[.$C$4];-[.$C$2])))" office:value-type="float" office:value="0" calcext:value-type="float">
            <text:p>0.00</text:p>
          </table:table-cell>
          <table:table-cell table:style-name="ce373" table:formula="of:=IF([.A288]=0;0;(PMT([.$C$3];[.$C$4];-[.$C$2])))" office:value-type="float" office:value="0" calcext:value-type="float">
            <text:p>0.00</text:p>
          </table:table-cell>
          <table:table-cell table:style-name="ce373" table:formula="of:=IF([.A288]=0;0;([.$C$2]-[.F288]))" office:value-type="float" office:value="0" calcext:value-type="float">
            <text:p>0.00</text:p>
          </table:table-cell>
          <table:table-cell table:style-name="ce373" table:formula="of:=IF([.A288]=0;0;([.B288]+[.F28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8]&gt;=[.$C$4];0;IF([.A288]=0;0;(1+[.A288])))" office:value-type="float" office:value="0" calcext:value-type="float">
            <text:p>0</text:p>
          </table:table-cell>
          <table:table-cell table:style-name="ce373" table:formula="of:=IF([.A289]=0;0;(PPMT([.$C$3];[.A289];[.$C$4];-[.$C$2])))" office:value-type="float" office:value="0" calcext:value-type="float">
            <text:p>0.00</text:p>
          </table:table-cell>
          <table:table-cell table:style-name="ce373" table:formula="of:=IF([.A289]=0;0;(IPMT([.$C$3];[.A289];[.$C$4];-[.$C$2])))" office:value-type="float" office:value="0" calcext:value-type="float">
            <text:p>0.00</text:p>
          </table:table-cell>
          <table:table-cell table:style-name="ce373" table:formula="of:=IF([.A289]=0;0;(PMT([.$C$3];[.$C$4];-[.$C$2])))" office:value-type="float" office:value="0" calcext:value-type="float">
            <text:p>0.00</text:p>
          </table:table-cell>
          <table:table-cell table:style-name="ce373" table:formula="of:=IF([.A289]=0;0;([.$C$2]-[.F289]))" office:value-type="float" office:value="0" calcext:value-type="float">
            <text:p>0.00</text:p>
          </table:table-cell>
          <table:table-cell table:style-name="ce373" table:formula="of:=IF([.A289]=0;0;([.B289]+[.F28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89]&gt;=[.$C$4];0;IF([.A289]=0;0;(1+[.A289])))" office:value-type="float" office:value="0" calcext:value-type="float">
            <text:p>0</text:p>
          </table:table-cell>
          <table:table-cell table:style-name="ce373" table:formula="of:=IF([.A290]=0;0;(PPMT([.$C$3];[.A290];[.$C$4];-[.$C$2])))" office:value-type="float" office:value="0" calcext:value-type="float">
            <text:p>0.00</text:p>
          </table:table-cell>
          <table:table-cell table:style-name="ce373" table:formula="of:=IF([.A290]=0;0;(IPMT([.$C$3];[.A290];[.$C$4];-[.$C$2])))" office:value-type="float" office:value="0" calcext:value-type="float">
            <text:p>0.00</text:p>
          </table:table-cell>
          <table:table-cell table:style-name="ce373" table:formula="of:=IF([.A290]=0;0;(PMT([.$C$3];[.$C$4];-[.$C$2])))" office:value-type="float" office:value="0" calcext:value-type="float">
            <text:p>0.00</text:p>
          </table:table-cell>
          <table:table-cell table:style-name="ce373" table:formula="of:=IF([.A290]=0;0;([.$C$2]-[.F290]))" office:value-type="float" office:value="0" calcext:value-type="float">
            <text:p>0.00</text:p>
          </table:table-cell>
          <table:table-cell table:style-name="ce373" table:formula="of:=IF([.A290]=0;0;([.B290]+[.F28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0]&gt;=[.$C$4];0;IF([.A290]=0;0;(1+[.A290])))" office:value-type="float" office:value="0" calcext:value-type="float">
            <text:p>0</text:p>
          </table:table-cell>
          <table:table-cell table:style-name="ce373" table:formula="of:=IF([.A291]=0;0;(PPMT([.$C$3];[.A291];[.$C$4];-[.$C$2])))" office:value-type="float" office:value="0" calcext:value-type="float">
            <text:p>0.00</text:p>
          </table:table-cell>
          <table:table-cell table:style-name="ce373" table:formula="of:=IF([.A291]=0;0;(IPMT([.$C$3];[.A291];[.$C$4];-[.$C$2])))" office:value-type="float" office:value="0" calcext:value-type="float">
            <text:p>0.00</text:p>
          </table:table-cell>
          <table:table-cell table:style-name="ce373" table:formula="of:=IF([.A291]=0;0;(PMT([.$C$3];[.$C$4];-[.$C$2])))" office:value-type="float" office:value="0" calcext:value-type="float">
            <text:p>0.00</text:p>
          </table:table-cell>
          <table:table-cell table:style-name="ce373" table:formula="of:=IF([.A291]=0;0;([.$C$2]-[.F291]))" office:value-type="float" office:value="0" calcext:value-type="float">
            <text:p>0.00</text:p>
          </table:table-cell>
          <table:table-cell table:style-name="ce373" table:formula="of:=IF([.A291]=0;0;([.B291]+[.F29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1]&gt;=[.$C$4];0;IF([.A291]=0;0;(1+[.A291])))" office:value-type="float" office:value="0" calcext:value-type="float">
            <text:p>0</text:p>
          </table:table-cell>
          <table:table-cell table:style-name="ce373" table:formula="of:=IF([.A292]=0;0;(PPMT([.$C$3];[.A292];[.$C$4];-[.$C$2])))" office:value-type="float" office:value="0" calcext:value-type="float">
            <text:p>0.00</text:p>
          </table:table-cell>
          <table:table-cell table:style-name="ce373" table:formula="of:=IF([.A292]=0;0;(IPMT([.$C$3];[.A292];[.$C$4];-[.$C$2])))" office:value-type="float" office:value="0" calcext:value-type="float">
            <text:p>0.00</text:p>
          </table:table-cell>
          <table:table-cell table:style-name="ce373" table:formula="of:=IF([.A292]=0;0;(PMT([.$C$3];[.$C$4];-[.$C$2])))" office:value-type="float" office:value="0" calcext:value-type="float">
            <text:p>0.00</text:p>
          </table:table-cell>
          <table:table-cell table:style-name="ce373" table:formula="of:=IF([.A292]=0;0;([.$C$2]-[.F292]))" office:value-type="float" office:value="0" calcext:value-type="float">
            <text:p>0.00</text:p>
          </table:table-cell>
          <table:table-cell table:style-name="ce373" table:formula="of:=IF([.A292]=0;0;([.B292]+[.F29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2]&gt;=[.$C$4];0;IF([.A292]=0;0;(1+[.A292])))" office:value-type="float" office:value="0" calcext:value-type="float">
            <text:p>0</text:p>
          </table:table-cell>
          <table:table-cell table:style-name="ce373" table:formula="of:=IF([.A293]=0;0;(PPMT([.$C$3];[.A293];[.$C$4];-[.$C$2])))" office:value-type="float" office:value="0" calcext:value-type="float">
            <text:p>0.00</text:p>
          </table:table-cell>
          <table:table-cell table:style-name="ce373" table:formula="of:=IF([.A293]=0;0;(IPMT([.$C$3];[.A293];[.$C$4];-[.$C$2])))" office:value-type="float" office:value="0" calcext:value-type="float">
            <text:p>0.00</text:p>
          </table:table-cell>
          <table:table-cell table:style-name="ce373" table:formula="of:=IF([.A293]=0;0;(PMT([.$C$3];[.$C$4];-[.$C$2])))" office:value-type="float" office:value="0" calcext:value-type="float">
            <text:p>0.00</text:p>
          </table:table-cell>
          <table:table-cell table:style-name="ce373" table:formula="of:=IF([.A293]=0;0;([.$C$2]-[.F293]))" office:value-type="float" office:value="0" calcext:value-type="float">
            <text:p>0.00</text:p>
          </table:table-cell>
          <table:table-cell table:style-name="ce373" table:formula="of:=IF([.A293]=0;0;([.B293]+[.F29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3]&gt;=[.$C$4];0;IF([.A293]=0;0;(1+[.A293])))" office:value-type="float" office:value="0" calcext:value-type="float">
            <text:p>0</text:p>
          </table:table-cell>
          <table:table-cell table:style-name="ce373" table:formula="of:=IF([.A294]=0;0;(PPMT([.$C$3];[.A294];[.$C$4];-[.$C$2])))" office:value-type="float" office:value="0" calcext:value-type="float">
            <text:p>0.00</text:p>
          </table:table-cell>
          <table:table-cell table:style-name="ce373" table:formula="of:=IF([.A294]=0;0;(IPMT([.$C$3];[.A294];[.$C$4];-[.$C$2])))" office:value-type="float" office:value="0" calcext:value-type="float">
            <text:p>0.00</text:p>
          </table:table-cell>
          <table:table-cell table:style-name="ce373" table:formula="of:=IF([.A294]=0;0;(PMT([.$C$3];[.$C$4];-[.$C$2])))" office:value-type="float" office:value="0" calcext:value-type="float">
            <text:p>0.00</text:p>
          </table:table-cell>
          <table:table-cell table:style-name="ce373" table:formula="of:=IF([.A294]=0;0;([.$C$2]-[.F294]))" office:value-type="float" office:value="0" calcext:value-type="float">
            <text:p>0.00</text:p>
          </table:table-cell>
          <table:table-cell table:style-name="ce373" table:formula="of:=IF([.A294]=0;0;([.B294]+[.F29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4]&gt;=[.$C$4];0;IF([.A294]=0;0;(1+[.A294])))" office:value-type="float" office:value="0" calcext:value-type="float">
            <text:p>0</text:p>
          </table:table-cell>
          <table:table-cell table:style-name="ce373" table:formula="of:=IF([.A295]=0;0;(PPMT([.$C$3];[.A295];[.$C$4];-[.$C$2])))" office:value-type="float" office:value="0" calcext:value-type="float">
            <text:p>0.00</text:p>
          </table:table-cell>
          <table:table-cell table:style-name="ce373" table:formula="of:=IF([.A295]=0;0;(IPMT([.$C$3];[.A295];[.$C$4];-[.$C$2])))" office:value-type="float" office:value="0" calcext:value-type="float">
            <text:p>0.00</text:p>
          </table:table-cell>
          <table:table-cell table:style-name="ce373" table:formula="of:=IF([.A295]=0;0;(PMT([.$C$3];[.$C$4];-[.$C$2])))" office:value-type="float" office:value="0" calcext:value-type="float">
            <text:p>0.00</text:p>
          </table:table-cell>
          <table:table-cell table:style-name="ce373" table:formula="of:=IF([.A295]=0;0;([.$C$2]-[.F295]))" office:value-type="float" office:value="0" calcext:value-type="float">
            <text:p>0.00</text:p>
          </table:table-cell>
          <table:table-cell table:style-name="ce373" table:formula="of:=IF([.A295]=0;0;([.B295]+[.F29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5]&gt;=[.$C$4];0;IF([.A295]=0;0;(1+[.A295])))" office:value-type="float" office:value="0" calcext:value-type="float">
            <text:p>0</text:p>
          </table:table-cell>
          <table:table-cell table:style-name="ce373" table:formula="of:=IF([.A296]=0;0;(PPMT([.$C$3];[.A296];[.$C$4];-[.$C$2])))" office:value-type="float" office:value="0" calcext:value-type="float">
            <text:p>0.00</text:p>
          </table:table-cell>
          <table:table-cell table:style-name="ce373" table:formula="of:=IF([.A296]=0;0;(IPMT([.$C$3];[.A296];[.$C$4];-[.$C$2])))" office:value-type="float" office:value="0" calcext:value-type="float">
            <text:p>0.00</text:p>
          </table:table-cell>
          <table:table-cell table:style-name="ce373" table:formula="of:=IF([.A296]=0;0;(PMT([.$C$3];[.$C$4];-[.$C$2])))" office:value-type="float" office:value="0" calcext:value-type="float">
            <text:p>0.00</text:p>
          </table:table-cell>
          <table:table-cell table:style-name="ce373" table:formula="of:=IF([.A296]=0;0;([.$C$2]-[.F296]))" office:value-type="float" office:value="0" calcext:value-type="float">
            <text:p>0.00</text:p>
          </table:table-cell>
          <table:table-cell table:style-name="ce373" table:formula="of:=IF([.A296]=0;0;([.B296]+[.F29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6]&gt;=[.$C$4];0;IF([.A296]=0;0;(1+[.A296])))" office:value-type="float" office:value="0" calcext:value-type="float">
            <text:p>0</text:p>
          </table:table-cell>
          <table:table-cell table:style-name="ce373" table:formula="of:=IF([.A297]=0;0;(PPMT([.$C$3];[.A297];[.$C$4];-[.$C$2])))" office:value-type="float" office:value="0" calcext:value-type="float">
            <text:p>0.00</text:p>
          </table:table-cell>
          <table:table-cell table:style-name="ce373" table:formula="of:=IF([.A297]=0;0;(IPMT([.$C$3];[.A297];[.$C$4];-[.$C$2])))" office:value-type="float" office:value="0" calcext:value-type="float">
            <text:p>0.00</text:p>
          </table:table-cell>
          <table:table-cell table:style-name="ce373" table:formula="of:=IF([.A297]=0;0;(PMT([.$C$3];[.$C$4];-[.$C$2])))" office:value-type="float" office:value="0" calcext:value-type="float">
            <text:p>0.00</text:p>
          </table:table-cell>
          <table:table-cell table:style-name="ce373" table:formula="of:=IF([.A297]=0;0;([.$C$2]-[.F297]))" office:value-type="float" office:value="0" calcext:value-type="float">
            <text:p>0.00</text:p>
          </table:table-cell>
          <table:table-cell table:style-name="ce373" table:formula="of:=IF([.A297]=0;0;([.B297]+[.F29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7]&gt;=[.$C$4];0;IF([.A297]=0;0;(1+[.A297])))" office:value-type="float" office:value="0" calcext:value-type="float">
            <text:p>0</text:p>
          </table:table-cell>
          <table:table-cell table:style-name="ce373" table:formula="of:=IF([.A298]=0;0;(PPMT([.$C$3];[.A298];[.$C$4];-[.$C$2])))" office:value-type="float" office:value="0" calcext:value-type="float">
            <text:p>0.00</text:p>
          </table:table-cell>
          <table:table-cell table:style-name="ce373" table:formula="of:=IF([.A298]=0;0;(IPMT([.$C$3];[.A298];[.$C$4];-[.$C$2])))" office:value-type="float" office:value="0" calcext:value-type="float">
            <text:p>0.00</text:p>
          </table:table-cell>
          <table:table-cell table:style-name="ce373" table:formula="of:=IF([.A298]=0;0;(PMT([.$C$3];[.$C$4];-[.$C$2])))" office:value-type="float" office:value="0" calcext:value-type="float">
            <text:p>0.00</text:p>
          </table:table-cell>
          <table:table-cell table:style-name="ce373" table:formula="of:=IF([.A298]=0;0;([.$C$2]-[.F298]))" office:value-type="float" office:value="0" calcext:value-type="float">
            <text:p>0.00</text:p>
          </table:table-cell>
          <table:table-cell table:style-name="ce373" table:formula="of:=IF([.A298]=0;0;([.B298]+[.F29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8]&gt;=[.$C$4];0;IF([.A298]=0;0;(1+[.A298])))" office:value-type="float" office:value="0" calcext:value-type="float">
            <text:p>0</text:p>
          </table:table-cell>
          <table:table-cell table:style-name="ce373" table:formula="of:=IF([.A299]=0;0;(PPMT([.$C$3];[.A299];[.$C$4];-[.$C$2])))" office:value-type="float" office:value="0" calcext:value-type="float">
            <text:p>0.00</text:p>
          </table:table-cell>
          <table:table-cell table:style-name="ce373" table:formula="of:=IF([.A299]=0;0;(IPMT([.$C$3];[.A299];[.$C$4];-[.$C$2])))" office:value-type="float" office:value="0" calcext:value-type="float">
            <text:p>0.00</text:p>
          </table:table-cell>
          <table:table-cell table:style-name="ce373" table:formula="of:=IF([.A299]=0;0;(PMT([.$C$3];[.$C$4];-[.$C$2])))" office:value-type="float" office:value="0" calcext:value-type="float">
            <text:p>0.00</text:p>
          </table:table-cell>
          <table:table-cell table:style-name="ce373" table:formula="of:=IF([.A299]=0;0;([.$C$2]-[.F299]))" office:value-type="float" office:value="0" calcext:value-type="float">
            <text:p>0.00</text:p>
          </table:table-cell>
          <table:table-cell table:style-name="ce373" table:formula="of:=IF([.A299]=0;0;([.B299]+[.F29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299]&gt;=[.$C$4];0;IF([.A299]=0;0;(1+[.A299])))" office:value-type="float" office:value="0" calcext:value-type="float">
            <text:p>0</text:p>
          </table:table-cell>
          <table:table-cell table:style-name="ce373" table:formula="of:=IF([.A300]=0;0;(PPMT([.$C$3];[.A300];[.$C$4];-[.$C$2])))" office:value-type="float" office:value="0" calcext:value-type="float">
            <text:p>0.00</text:p>
          </table:table-cell>
          <table:table-cell table:style-name="ce373" table:formula="of:=IF([.A300]=0;0;(IPMT([.$C$3];[.A300];[.$C$4];-[.$C$2])))" office:value-type="float" office:value="0" calcext:value-type="float">
            <text:p>0.00</text:p>
          </table:table-cell>
          <table:table-cell table:style-name="ce373" table:formula="of:=IF([.A300]=0;0;(PMT([.$C$3];[.$C$4];-[.$C$2])))" office:value-type="float" office:value="0" calcext:value-type="float">
            <text:p>0.00</text:p>
          </table:table-cell>
          <table:table-cell table:style-name="ce373" table:formula="of:=IF([.A300]=0;0;([.$C$2]-[.F300]))" office:value-type="float" office:value="0" calcext:value-type="float">
            <text:p>0.00</text:p>
          </table:table-cell>
          <table:table-cell table:style-name="ce373" table:formula="of:=IF([.A300]=0;0;([.B300]+[.F29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0]&gt;=[.$C$4];0;IF([.A300]=0;0;(1+[.A300])))" office:value-type="float" office:value="0" calcext:value-type="float">
            <text:p>0</text:p>
          </table:table-cell>
          <table:table-cell table:style-name="ce373" table:formula="of:=IF([.A301]=0;0;(PPMT([.$C$3];[.A301];[.$C$4];-[.$C$2])))" office:value-type="float" office:value="0" calcext:value-type="float">
            <text:p>0.00</text:p>
          </table:table-cell>
          <table:table-cell table:style-name="ce373" table:formula="of:=IF([.A301]=0;0;(IPMT([.$C$3];[.A301];[.$C$4];-[.$C$2])))" office:value-type="float" office:value="0" calcext:value-type="float">
            <text:p>0.00</text:p>
          </table:table-cell>
          <table:table-cell table:style-name="ce373" table:formula="of:=IF([.A301]=0;0;(PMT([.$C$3];[.$C$4];-[.$C$2])))" office:value-type="float" office:value="0" calcext:value-type="float">
            <text:p>0.00</text:p>
          </table:table-cell>
          <table:table-cell table:style-name="ce373" table:formula="of:=IF([.A301]=0;0;([.$C$2]-[.F301]))" office:value-type="float" office:value="0" calcext:value-type="float">
            <text:p>0.00</text:p>
          </table:table-cell>
          <table:table-cell table:style-name="ce373" table:formula="of:=IF([.A301]=0;0;([.B301]+[.F30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1]&gt;=[.$C$4];0;IF([.A301]=0;0;(1+[.A301])))" office:value-type="float" office:value="0" calcext:value-type="float">
            <text:p>0</text:p>
          </table:table-cell>
          <table:table-cell table:style-name="ce373" table:formula="of:=IF([.A302]=0;0;(PPMT([.$C$3];[.A302];[.$C$4];-[.$C$2])))" office:value-type="float" office:value="0" calcext:value-type="float">
            <text:p>0.00</text:p>
          </table:table-cell>
          <table:table-cell table:style-name="ce373" table:formula="of:=IF([.A302]=0;0;(IPMT([.$C$3];[.A302];[.$C$4];-[.$C$2])))" office:value-type="float" office:value="0" calcext:value-type="float">
            <text:p>0.00</text:p>
          </table:table-cell>
          <table:table-cell table:style-name="ce373" table:formula="of:=IF([.A302]=0;0;(PMT([.$C$3];[.$C$4];-[.$C$2])))" office:value-type="float" office:value="0" calcext:value-type="float">
            <text:p>0.00</text:p>
          </table:table-cell>
          <table:table-cell table:style-name="ce373" table:formula="of:=IF([.A302]=0;0;([.$C$2]-[.F302]))" office:value-type="float" office:value="0" calcext:value-type="float">
            <text:p>0.00</text:p>
          </table:table-cell>
          <table:table-cell table:style-name="ce373" table:formula="of:=IF([.A302]=0;0;([.B302]+[.F30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2]&gt;=[.$C$4];0;IF([.A302]=0;0;(1+[.A302])))" office:value-type="float" office:value="0" calcext:value-type="float">
            <text:p>0</text:p>
          </table:table-cell>
          <table:table-cell table:style-name="ce373" table:formula="of:=IF([.A303]=0;0;(PPMT([.$C$3];[.A303];[.$C$4];-[.$C$2])))" office:value-type="float" office:value="0" calcext:value-type="float">
            <text:p>0.00</text:p>
          </table:table-cell>
          <table:table-cell table:style-name="ce373" table:formula="of:=IF([.A303]=0;0;(IPMT([.$C$3];[.A303];[.$C$4];-[.$C$2])))" office:value-type="float" office:value="0" calcext:value-type="float">
            <text:p>0.00</text:p>
          </table:table-cell>
          <table:table-cell table:style-name="ce373" table:formula="of:=IF([.A303]=0;0;(PMT([.$C$3];[.$C$4];-[.$C$2])))" office:value-type="float" office:value="0" calcext:value-type="float">
            <text:p>0.00</text:p>
          </table:table-cell>
          <table:table-cell table:style-name="ce373" table:formula="of:=IF([.A303]=0;0;([.$C$2]-[.F303]))" office:value-type="float" office:value="0" calcext:value-type="float">
            <text:p>0.00</text:p>
          </table:table-cell>
          <table:table-cell table:style-name="ce373" table:formula="of:=IF([.A303]=0;0;([.B303]+[.F30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3]&gt;=[.$C$4];0;IF([.A303]=0;0;(1+[.A303])))" office:value-type="float" office:value="0" calcext:value-type="float">
            <text:p>0</text:p>
          </table:table-cell>
          <table:table-cell table:style-name="ce373" table:formula="of:=IF([.A304]=0;0;(PPMT([.$C$3];[.A304];[.$C$4];-[.$C$2])))" office:value-type="float" office:value="0" calcext:value-type="float">
            <text:p>0.00</text:p>
          </table:table-cell>
          <table:table-cell table:style-name="ce373" table:formula="of:=IF([.A304]=0;0;(IPMT([.$C$3];[.A304];[.$C$4];-[.$C$2])))" office:value-type="float" office:value="0" calcext:value-type="float">
            <text:p>0.00</text:p>
          </table:table-cell>
          <table:table-cell table:style-name="ce373" table:formula="of:=IF([.A304]=0;0;(PMT([.$C$3];[.$C$4];-[.$C$2])))" office:value-type="float" office:value="0" calcext:value-type="float">
            <text:p>0.00</text:p>
          </table:table-cell>
          <table:table-cell table:style-name="ce373" table:formula="of:=IF([.A304]=0;0;([.$C$2]-[.F304]))" office:value-type="float" office:value="0" calcext:value-type="float">
            <text:p>0.00</text:p>
          </table:table-cell>
          <table:table-cell table:style-name="ce373" table:formula="of:=IF([.A304]=0;0;([.B304]+[.F30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4]&gt;=[.$C$4];0;IF([.A304]=0;0;(1+[.A304])))" office:value-type="float" office:value="0" calcext:value-type="float">
            <text:p>0</text:p>
          </table:table-cell>
          <table:table-cell table:style-name="ce373" table:formula="of:=IF([.A305]=0;0;(PPMT([.$C$3];[.A305];[.$C$4];-[.$C$2])))" office:value-type="float" office:value="0" calcext:value-type="float">
            <text:p>0.00</text:p>
          </table:table-cell>
          <table:table-cell table:style-name="ce373" table:formula="of:=IF([.A305]=0;0;(IPMT([.$C$3];[.A305];[.$C$4];-[.$C$2])))" office:value-type="float" office:value="0" calcext:value-type="float">
            <text:p>0.00</text:p>
          </table:table-cell>
          <table:table-cell table:style-name="ce373" table:formula="of:=IF([.A305]=0;0;(PMT([.$C$3];[.$C$4];-[.$C$2])))" office:value-type="float" office:value="0" calcext:value-type="float">
            <text:p>0.00</text:p>
          </table:table-cell>
          <table:table-cell table:style-name="ce373" table:formula="of:=IF([.A305]=0;0;([.$C$2]-[.F305]))" office:value-type="float" office:value="0" calcext:value-type="float">
            <text:p>0.00</text:p>
          </table:table-cell>
          <table:table-cell table:style-name="ce373" table:formula="of:=IF([.A305]=0;0;([.B305]+[.F30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5]&gt;=[.$C$4];0;IF([.A305]=0;0;(1+[.A305])))" office:value-type="float" office:value="0" calcext:value-type="float">
            <text:p>0</text:p>
          </table:table-cell>
          <table:table-cell table:style-name="ce373" table:formula="of:=IF([.A306]=0;0;(PPMT([.$C$3];[.A306];[.$C$4];-[.$C$2])))" office:value-type="float" office:value="0" calcext:value-type="float">
            <text:p>0.00</text:p>
          </table:table-cell>
          <table:table-cell table:style-name="ce373" table:formula="of:=IF([.A306]=0;0;(IPMT([.$C$3];[.A306];[.$C$4];-[.$C$2])))" office:value-type="float" office:value="0" calcext:value-type="float">
            <text:p>0.00</text:p>
          </table:table-cell>
          <table:table-cell table:style-name="ce373" table:formula="of:=IF([.A306]=0;0;(PMT([.$C$3];[.$C$4];-[.$C$2])))" office:value-type="float" office:value="0" calcext:value-type="float">
            <text:p>0.00</text:p>
          </table:table-cell>
          <table:table-cell table:style-name="ce373" table:formula="of:=IF([.A306]=0;0;([.$C$2]-[.F306]))" office:value-type="float" office:value="0" calcext:value-type="float">
            <text:p>0.00</text:p>
          </table:table-cell>
          <table:table-cell table:style-name="ce373" table:formula="of:=IF([.A306]=0;0;([.B306]+[.F30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6]&gt;=[.$C$4];0;IF([.A306]=0;0;(1+[.A306])))" office:value-type="float" office:value="0" calcext:value-type="float">
            <text:p>0</text:p>
          </table:table-cell>
          <table:table-cell table:style-name="ce373" table:formula="of:=IF([.A307]=0;0;(PPMT([.$C$3];[.A307];[.$C$4];-[.$C$2])))" office:value-type="float" office:value="0" calcext:value-type="float">
            <text:p>0.00</text:p>
          </table:table-cell>
          <table:table-cell table:style-name="ce373" table:formula="of:=IF([.A307]=0;0;(IPMT([.$C$3];[.A307];[.$C$4];-[.$C$2])))" office:value-type="float" office:value="0" calcext:value-type="float">
            <text:p>0.00</text:p>
          </table:table-cell>
          <table:table-cell table:style-name="ce373" table:formula="of:=IF([.A307]=0;0;(PMT([.$C$3];[.$C$4];-[.$C$2])))" office:value-type="float" office:value="0" calcext:value-type="float">
            <text:p>0.00</text:p>
          </table:table-cell>
          <table:table-cell table:style-name="ce373" table:formula="of:=IF([.A307]=0;0;([.$C$2]-[.F307]))" office:value-type="float" office:value="0" calcext:value-type="float">
            <text:p>0.00</text:p>
          </table:table-cell>
          <table:table-cell table:style-name="ce373" table:formula="of:=IF([.A307]=0;0;([.B307]+[.F30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7]&gt;=[.$C$4];0;IF([.A307]=0;0;(1+[.A307])))" office:value-type="float" office:value="0" calcext:value-type="float">
            <text:p>0</text:p>
          </table:table-cell>
          <table:table-cell table:style-name="ce373" table:formula="of:=IF([.A308]=0;0;(PPMT([.$C$3];[.A308];[.$C$4];-[.$C$2])))" office:value-type="float" office:value="0" calcext:value-type="float">
            <text:p>0.00</text:p>
          </table:table-cell>
          <table:table-cell table:style-name="ce373" table:formula="of:=IF([.A308]=0;0;(IPMT([.$C$3];[.A308];[.$C$4];-[.$C$2])))" office:value-type="float" office:value="0" calcext:value-type="float">
            <text:p>0.00</text:p>
          </table:table-cell>
          <table:table-cell table:style-name="ce373" table:formula="of:=IF([.A308]=0;0;(PMT([.$C$3];[.$C$4];-[.$C$2])))" office:value-type="float" office:value="0" calcext:value-type="float">
            <text:p>0.00</text:p>
          </table:table-cell>
          <table:table-cell table:style-name="ce373" table:formula="of:=IF([.A308]=0;0;([.$C$2]-[.F308]))" office:value-type="float" office:value="0" calcext:value-type="float">
            <text:p>0.00</text:p>
          </table:table-cell>
          <table:table-cell table:style-name="ce373" table:formula="of:=IF([.A308]=0;0;([.B308]+[.F30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8]&gt;=[.$C$4];0;IF([.A308]=0;0;(1+[.A308])))" office:value-type="float" office:value="0" calcext:value-type="float">
            <text:p>0</text:p>
          </table:table-cell>
          <table:table-cell table:style-name="ce373" table:formula="of:=IF([.A309]=0;0;(PPMT([.$C$3];[.A309];[.$C$4];-[.$C$2])))" office:value-type="float" office:value="0" calcext:value-type="float">
            <text:p>0.00</text:p>
          </table:table-cell>
          <table:table-cell table:style-name="ce373" table:formula="of:=IF([.A309]=0;0;(IPMT([.$C$3];[.A309];[.$C$4];-[.$C$2])))" office:value-type="float" office:value="0" calcext:value-type="float">
            <text:p>0.00</text:p>
          </table:table-cell>
          <table:table-cell table:style-name="ce373" table:formula="of:=IF([.A309]=0;0;(PMT([.$C$3];[.$C$4];-[.$C$2])))" office:value-type="float" office:value="0" calcext:value-type="float">
            <text:p>0.00</text:p>
          </table:table-cell>
          <table:table-cell table:style-name="ce373" table:formula="of:=IF([.A309]=0;0;([.$C$2]-[.F309]))" office:value-type="float" office:value="0" calcext:value-type="float">
            <text:p>0.00</text:p>
          </table:table-cell>
          <table:table-cell table:style-name="ce373" table:formula="of:=IF([.A309]=0;0;([.B309]+[.F30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09]&gt;=[.$C$4];0;IF([.A309]=0;0;(1+[.A309])))" office:value-type="float" office:value="0" calcext:value-type="float">
            <text:p>0</text:p>
          </table:table-cell>
          <table:table-cell table:style-name="ce373" table:formula="of:=IF([.A310]=0;0;(PPMT([.$C$3];[.A310];[.$C$4];-[.$C$2])))" office:value-type="float" office:value="0" calcext:value-type="float">
            <text:p>0.00</text:p>
          </table:table-cell>
          <table:table-cell table:style-name="ce373" table:formula="of:=IF([.A310]=0;0;(IPMT([.$C$3];[.A310];[.$C$4];-[.$C$2])))" office:value-type="float" office:value="0" calcext:value-type="float">
            <text:p>0.00</text:p>
          </table:table-cell>
          <table:table-cell table:style-name="ce373" table:formula="of:=IF([.A310]=0;0;(PMT([.$C$3];[.$C$4];-[.$C$2])))" office:value-type="float" office:value="0" calcext:value-type="float">
            <text:p>0.00</text:p>
          </table:table-cell>
          <table:table-cell table:style-name="ce373" table:formula="of:=IF([.A310]=0;0;([.$C$2]-[.F310]))" office:value-type="float" office:value="0" calcext:value-type="float">
            <text:p>0.00</text:p>
          </table:table-cell>
          <table:table-cell table:style-name="ce373" table:formula="of:=IF([.A310]=0;0;([.B310]+[.F30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0]&gt;=[.$C$4];0;IF([.A310]=0;0;(1+[.A310])))" office:value-type="float" office:value="0" calcext:value-type="float">
            <text:p>0</text:p>
          </table:table-cell>
          <table:table-cell table:style-name="ce373" table:formula="of:=IF([.A311]=0;0;(PPMT([.$C$3];[.A311];[.$C$4];-[.$C$2])))" office:value-type="float" office:value="0" calcext:value-type="float">
            <text:p>0.00</text:p>
          </table:table-cell>
          <table:table-cell table:style-name="ce373" table:formula="of:=IF([.A311]=0;0;(IPMT([.$C$3];[.A311];[.$C$4];-[.$C$2])))" office:value-type="float" office:value="0" calcext:value-type="float">
            <text:p>0.00</text:p>
          </table:table-cell>
          <table:table-cell table:style-name="ce373" table:formula="of:=IF([.A311]=0;0;(PMT([.$C$3];[.$C$4];-[.$C$2])))" office:value-type="float" office:value="0" calcext:value-type="float">
            <text:p>0.00</text:p>
          </table:table-cell>
          <table:table-cell table:style-name="ce373" table:formula="of:=IF([.A311]=0;0;([.$C$2]-[.F311]))" office:value-type="float" office:value="0" calcext:value-type="float">
            <text:p>0.00</text:p>
          </table:table-cell>
          <table:table-cell table:style-name="ce373" table:formula="of:=IF([.A311]=0;0;([.B311]+[.F31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1]&gt;=[.$C$4];0;IF([.A311]=0;0;(1+[.A311])))" office:value-type="float" office:value="0" calcext:value-type="float">
            <text:p>0</text:p>
          </table:table-cell>
          <table:table-cell table:style-name="ce373" table:formula="of:=IF([.A312]=0;0;(PPMT([.$C$3];[.A312];[.$C$4];-[.$C$2])))" office:value-type="float" office:value="0" calcext:value-type="float">
            <text:p>0.00</text:p>
          </table:table-cell>
          <table:table-cell table:style-name="ce373" table:formula="of:=IF([.A312]=0;0;(IPMT([.$C$3];[.A312];[.$C$4];-[.$C$2])))" office:value-type="float" office:value="0" calcext:value-type="float">
            <text:p>0.00</text:p>
          </table:table-cell>
          <table:table-cell table:style-name="ce373" table:formula="of:=IF([.A312]=0;0;(PMT([.$C$3];[.$C$4];-[.$C$2])))" office:value-type="float" office:value="0" calcext:value-type="float">
            <text:p>0.00</text:p>
          </table:table-cell>
          <table:table-cell table:style-name="ce373" table:formula="of:=IF([.A312]=0;0;([.$C$2]-[.F312]))" office:value-type="float" office:value="0" calcext:value-type="float">
            <text:p>0.00</text:p>
          </table:table-cell>
          <table:table-cell table:style-name="ce373" table:formula="of:=IF([.A312]=0;0;([.B312]+[.F31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2]&gt;=[.$C$4];0;IF([.A312]=0;0;(1+[.A312])))" office:value-type="float" office:value="0" calcext:value-type="float">
            <text:p>0</text:p>
          </table:table-cell>
          <table:table-cell table:style-name="ce373" table:formula="of:=IF([.A313]=0;0;(PPMT([.$C$3];[.A313];[.$C$4];-[.$C$2])))" office:value-type="float" office:value="0" calcext:value-type="float">
            <text:p>0.00</text:p>
          </table:table-cell>
          <table:table-cell table:style-name="ce373" table:formula="of:=IF([.A313]=0;0;(IPMT([.$C$3];[.A313];[.$C$4];-[.$C$2])))" office:value-type="float" office:value="0" calcext:value-type="float">
            <text:p>0.00</text:p>
          </table:table-cell>
          <table:table-cell table:style-name="ce373" table:formula="of:=IF([.A313]=0;0;(PMT([.$C$3];[.$C$4];-[.$C$2])))" office:value-type="float" office:value="0" calcext:value-type="float">
            <text:p>0.00</text:p>
          </table:table-cell>
          <table:table-cell table:style-name="ce373" table:formula="of:=IF([.A313]=0;0;([.$C$2]-[.F313]))" office:value-type="float" office:value="0" calcext:value-type="float">
            <text:p>0.00</text:p>
          </table:table-cell>
          <table:table-cell table:style-name="ce373" table:formula="of:=IF([.A313]=0;0;([.B313]+[.F31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3]&gt;=[.$C$4];0;IF([.A313]=0;0;(1+[.A313])))" office:value-type="float" office:value="0" calcext:value-type="float">
            <text:p>0</text:p>
          </table:table-cell>
          <table:table-cell table:style-name="ce373" table:formula="of:=IF([.A314]=0;0;(PPMT([.$C$3];[.A314];[.$C$4];-[.$C$2])))" office:value-type="float" office:value="0" calcext:value-type="float">
            <text:p>0.00</text:p>
          </table:table-cell>
          <table:table-cell table:style-name="ce373" table:formula="of:=IF([.A314]=0;0;(IPMT([.$C$3];[.A314];[.$C$4];-[.$C$2])))" office:value-type="float" office:value="0" calcext:value-type="float">
            <text:p>0.00</text:p>
          </table:table-cell>
          <table:table-cell table:style-name="ce373" table:formula="of:=IF([.A314]=0;0;(PMT([.$C$3];[.$C$4];-[.$C$2])))" office:value-type="float" office:value="0" calcext:value-type="float">
            <text:p>0.00</text:p>
          </table:table-cell>
          <table:table-cell table:style-name="ce373" table:formula="of:=IF([.A314]=0;0;([.$C$2]-[.F314]))" office:value-type="float" office:value="0" calcext:value-type="float">
            <text:p>0.00</text:p>
          </table:table-cell>
          <table:table-cell table:style-name="ce373" table:formula="of:=IF([.A314]=0;0;([.B314]+[.F31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4]&gt;=[.$C$4];0;IF([.A314]=0;0;(1+[.A314])))" office:value-type="float" office:value="0" calcext:value-type="float">
            <text:p>0</text:p>
          </table:table-cell>
          <table:table-cell table:style-name="ce373" table:formula="of:=IF([.A315]=0;0;(PPMT([.$C$3];[.A315];[.$C$4];-[.$C$2])))" office:value-type="float" office:value="0" calcext:value-type="float">
            <text:p>0.00</text:p>
          </table:table-cell>
          <table:table-cell table:style-name="ce373" table:formula="of:=IF([.A315]=0;0;(IPMT([.$C$3];[.A315];[.$C$4];-[.$C$2])))" office:value-type="float" office:value="0" calcext:value-type="float">
            <text:p>0.00</text:p>
          </table:table-cell>
          <table:table-cell table:style-name="ce373" table:formula="of:=IF([.A315]=0;0;(PMT([.$C$3];[.$C$4];-[.$C$2])))" office:value-type="float" office:value="0" calcext:value-type="float">
            <text:p>0.00</text:p>
          </table:table-cell>
          <table:table-cell table:style-name="ce373" table:formula="of:=IF([.A315]=0;0;([.$C$2]-[.F315]))" office:value-type="float" office:value="0" calcext:value-type="float">
            <text:p>0.00</text:p>
          </table:table-cell>
          <table:table-cell table:style-name="ce373" table:formula="of:=IF([.A315]=0;0;([.B315]+[.F31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5]&gt;=[.$C$4];0;IF([.A315]=0;0;(1+[.A315])))" office:value-type="float" office:value="0" calcext:value-type="float">
            <text:p>0</text:p>
          </table:table-cell>
          <table:table-cell table:style-name="ce373" table:formula="of:=IF([.A316]=0;0;(PPMT([.$C$3];[.A316];[.$C$4];-[.$C$2])))" office:value-type="float" office:value="0" calcext:value-type="float">
            <text:p>0.00</text:p>
          </table:table-cell>
          <table:table-cell table:style-name="ce373" table:formula="of:=IF([.A316]=0;0;(IPMT([.$C$3];[.A316];[.$C$4];-[.$C$2])))" office:value-type="float" office:value="0" calcext:value-type="float">
            <text:p>0.00</text:p>
          </table:table-cell>
          <table:table-cell table:style-name="ce373" table:formula="of:=IF([.A316]=0;0;(PMT([.$C$3];[.$C$4];-[.$C$2])))" office:value-type="float" office:value="0" calcext:value-type="float">
            <text:p>0.00</text:p>
          </table:table-cell>
          <table:table-cell table:style-name="ce373" table:formula="of:=IF([.A316]=0;0;([.$C$2]-[.F316]))" office:value-type="float" office:value="0" calcext:value-type="float">
            <text:p>0.00</text:p>
          </table:table-cell>
          <table:table-cell table:style-name="ce373" table:formula="of:=IF([.A316]=0;0;([.B316]+[.F31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6]&gt;=[.$C$4];0;IF([.A316]=0;0;(1+[.A316])))" office:value-type="float" office:value="0" calcext:value-type="float">
            <text:p>0</text:p>
          </table:table-cell>
          <table:table-cell table:style-name="ce373" table:formula="of:=IF([.A317]=0;0;(PPMT([.$C$3];[.A317];[.$C$4];-[.$C$2])))" office:value-type="float" office:value="0" calcext:value-type="float">
            <text:p>0.00</text:p>
          </table:table-cell>
          <table:table-cell table:style-name="ce373" table:formula="of:=IF([.A317]=0;0;(IPMT([.$C$3];[.A317];[.$C$4];-[.$C$2])))" office:value-type="float" office:value="0" calcext:value-type="float">
            <text:p>0.00</text:p>
          </table:table-cell>
          <table:table-cell table:style-name="ce373" table:formula="of:=IF([.A317]=0;0;(PMT([.$C$3];[.$C$4];-[.$C$2])))" office:value-type="float" office:value="0" calcext:value-type="float">
            <text:p>0.00</text:p>
          </table:table-cell>
          <table:table-cell table:style-name="ce373" table:formula="of:=IF([.A317]=0;0;([.$C$2]-[.F317]))" office:value-type="float" office:value="0" calcext:value-type="float">
            <text:p>0.00</text:p>
          </table:table-cell>
          <table:table-cell table:style-name="ce373" table:formula="of:=IF([.A317]=0;0;([.B317]+[.F31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7]&gt;=[.$C$4];0;IF([.A317]=0;0;(1+[.A317])))" office:value-type="float" office:value="0" calcext:value-type="float">
            <text:p>0</text:p>
          </table:table-cell>
          <table:table-cell table:style-name="ce373" table:formula="of:=IF([.A318]=0;0;(PPMT([.$C$3];[.A318];[.$C$4];-[.$C$2])))" office:value-type="float" office:value="0" calcext:value-type="float">
            <text:p>0.00</text:p>
          </table:table-cell>
          <table:table-cell table:style-name="ce373" table:formula="of:=IF([.A318]=0;0;(IPMT([.$C$3];[.A318];[.$C$4];-[.$C$2])))" office:value-type="float" office:value="0" calcext:value-type="float">
            <text:p>0.00</text:p>
          </table:table-cell>
          <table:table-cell table:style-name="ce373" table:formula="of:=IF([.A318]=0;0;(PMT([.$C$3];[.$C$4];-[.$C$2])))" office:value-type="float" office:value="0" calcext:value-type="float">
            <text:p>0.00</text:p>
          </table:table-cell>
          <table:table-cell table:style-name="ce373" table:formula="of:=IF([.A318]=0;0;([.$C$2]-[.F318]))" office:value-type="float" office:value="0" calcext:value-type="float">
            <text:p>0.00</text:p>
          </table:table-cell>
          <table:table-cell table:style-name="ce373" table:formula="of:=IF([.A318]=0;0;([.B318]+[.F31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8]&gt;=[.$C$4];0;IF([.A318]=0;0;(1+[.A318])))" office:value-type="float" office:value="0" calcext:value-type="float">
            <text:p>0</text:p>
          </table:table-cell>
          <table:table-cell table:style-name="ce373" table:formula="of:=IF([.A319]=0;0;(PPMT([.$C$3];[.A319];[.$C$4];-[.$C$2])))" office:value-type="float" office:value="0" calcext:value-type="float">
            <text:p>0.00</text:p>
          </table:table-cell>
          <table:table-cell table:style-name="ce373" table:formula="of:=IF([.A319]=0;0;(IPMT([.$C$3];[.A319];[.$C$4];-[.$C$2])))" office:value-type="float" office:value="0" calcext:value-type="float">
            <text:p>0.00</text:p>
          </table:table-cell>
          <table:table-cell table:style-name="ce373" table:formula="of:=IF([.A319]=0;0;(PMT([.$C$3];[.$C$4];-[.$C$2])))" office:value-type="float" office:value="0" calcext:value-type="float">
            <text:p>0.00</text:p>
          </table:table-cell>
          <table:table-cell table:style-name="ce373" table:formula="of:=IF([.A319]=0;0;([.$C$2]-[.F319]))" office:value-type="float" office:value="0" calcext:value-type="float">
            <text:p>0.00</text:p>
          </table:table-cell>
          <table:table-cell table:style-name="ce373" table:formula="of:=IF([.A319]=0;0;([.B319]+[.F31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19]&gt;=[.$C$4];0;IF([.A319]=0;0;(1+[.A319])))" office:value-type="float" office:value="0" calcext:value-type="float">
            <text:p>0</text:p>
          </table:table-cell>
          <table:table-cell table:style-name="ce373" table:formula="of:=IF([.A320]=0;0;(PPMT([.$C$3];[.A320];[.$C$4];-[.$C$2])))" office:value-type="float" office:value="0" calcext:value-type="float">
            <text:p>0.00</text:p>
          </table:table-cell>
          <table:table-cell table:style-name="ce373" table:formula="of:=IF([.A320]=0;0;(IPMT([.$C$3];[.A320];[.$C$4];-[.$C$2])))" office:value-type="float" office:value="0" calcext:value-type="float">
            <text:p>0.00</text:p>
          </table:table-cell>
          <table:table-cell table:style-name="ce373" table:formula="of:=IF([.A320]=0;0;(PMT([.$C$3];[.$C$4];-[.$C$2])))" office:value-type="float" office:value="0" calcext:value-type="float">
            <text:p>0.00</text:p>
          </table:table-cell>
          <table:table-cell table:style-name="ce373" table:formula="of:=IF([.A320]=0;0;([.$C$2]-[.F320]))" office:value-type="float" office:value="0" calcext:value-type="float">
            <text:p>0.00</text:p>
          </table:table-cell>
          <table:table-cell table:style-name="ce373" table:formula="of:=IF([.A320]=0;0;([.B320]+[.F31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0]&gt;=[.$C$4];0;IF([.A320]=0;0;(1+[.A320])))" office:value-type="float" office:value="0" calcext:value-type="float">
            <text:p>0</text:p>
          </table:table-cell>
          <table:table-cell table:style-name="ce373" table:formula="of:=IF([.A321]=0;0;(PPMT([.$C$3];[.A321];[.$C$4];-[.$C$2])))" office:value-type="float" office:value="0" calcext:value-type="float">
            <text:p>0.00</text:p>
          </table:table-cell>
          <table:table-cell table:style-name="ce373" table:formula="of:=IF([.A321]=0;0;(IPMT([.$C$3];[.A321];[.$C$4];-[.$C$2])))" office:value-type="float" office:value="0" calcext:value-type="float">
            <text:p>0.00</text:p>
          </table:table-cell>
          <table:table-cell table:style-name="ce373" table:formula="of:=IF([.A321]=0;0;(PMT([.$C$3];[.$C$4];-[.$C$2])))" office:value-type="float" office:value="0" calcext:value-type="float">
            <text:p>0.00</text:p>
          </table:table-cell>
          <table:table-cell table:style-name="ce373" table:formula="of:=IF([.A321]=0;0;([.$C$2]-[.F321]))" office:value-type="float" office:value="0" calcext:value-type="float">
            <text:p>0.00</text:p>
          </table:table-cell>
          <table:table-cell table:style-name="ce373" table:formula="of:=IF([.A321]=0;0;([.B321]+[.F32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1]&gt;=[.$C$4];0;IF([.A321]=0;0;(1+[.A321])))" office:value-type="float" office:value="0" calcext:value-type="float">
            <text:p>0</text:p>
          </table:table-cell>
          <table:table-cell table:style-name="ce373" table:formula="of:=IF([.A322]=0;0;(PPMT([.$C$3];[.A322];[.$C$4];-[.$C$2])))" office:value-type="float" office:value="0" calcext:value-type="float">
            <text:p>0.00</text:p>
          </table:table-cell>
          <table:table-cell table:style-name="ce373" table:formula="of:=IF([.A322]=0;0;(IPMT([.$C$3];[.A322];[.$C$4];-[.$C$2])))" office:value-type="float" office:value="0" calcext:value-type="float">
            <text:p>0.00</text:p>
          </table:table-cell>
          <table:table-cell table:style-name="ce373" table:formula="of:=IF([.A322]=0;0;(PMT([.$C$3];[.$C$4];-[.$C$2])))" office:value-type="float" office:value="0" calcext:value-type="float">
            <text:p>0.00</text:p>
          </table:table-cell>
          <table:table-cell table:style-name="ce373" table:formula="of:=IF([.A322]=0;0;([.$C$2]-[.F322]))" office:value-type="float" office:value="0" calcext:value-type="float">
            <text:p>0.00</text:p>
          </table:table-cell>
          <table:table-cell table:style-name="ce373" table:formula="of:=IF([.A322]=0;0;([.B322]+[.F32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2]&gt;=[.$C$4];0;IF([.A322]=0;0;(1+[.A322])))" office:value-type="float" office:value="0" calcext:value-type="float">
            <text:p>0</text:p>
          </table:table-cell>
          <table:table-cell table:style-name="ce373" table:formula="of:=IF([.A323]=0;0;(PPMT([.$C$3];[.A323];[.$C$4];-[.$C$2])))" office:value-type="float" office:value="0" calcext:value-type="float">
            <text:p>0.00</text:p>
          </table:table-cell>
          <table:table-cell table:style-name="ce373" table:formula="of:=IF([.A323]=0;0;(IPMT([.$C$3];[.A323];[.$C$4];-[.$C$2])))" office:value-type="float" office:value="0" calcext:value-type="float">
            <text:p>0.00</text:p>
          </table:table-cell>
          <table:table-cell table:style-name="ce373" table:formula="of:=IF([.A323]=0;0;(PMT([.$C$3];[.$C$4];-[.$C$2])))" office:value-type="float" office:value="0" calcext:value-type="float">
            <text:p>0.00</text:p>
          </table:table-cell>
          <table:table-cell table:style-name="ce373" table:formula="of:=IF([.A323]=0;0;([.$C$2]-[.F323]))" office:value-type="float" office:value="0" calcext:value-type="float">
            <text:p>0.00</text:p>
          </table:table-cell>
          <table:table-cell table:style-name="ce373" table:formula="of:=IF([.A323]=0;0;([.B323]+[.F32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3]&gt;=[.$C$4];0;IF([.A323]=0;0;(1+[.A323])))" office:value-type="float" office:value="0" calcext:value-type="float">
            <text:p>0</text:p>
          </table:table-cell>
          <table:table-cell table:style-name="ce373" table:formula="of:=IF([.A324]=0;0;(PPMT([.$C$3];[.A324];[.$C$4];-[.$C$2])))" office:value-type="float" office:value="0" calcext:value-type="float">
            <text:p>0.00</text:p>
          </table:table-cell>
          <table:table-cell table:style-name="ce373" table:formula="of:=IF([.A324]=0;0;(IPMT([.$C$3];[.A324];[.$C$4];-[.$C$2])))" office:value-type="float" office:value="0" calcext:value-type="float">
            <text:p>0.00</text:p>
          </table:table-cell>
          <table:table-cell table:style-name="ce373" table:formula="of:=IF([.A324]=0;0;(PMT([.$C$3];[.$C$4];-[.$C$2])))" office:value-type="float" office:value="0" calcext:value-type="float">
            <text:p>0.00</text:p>
          </table:table-cell>
          <table:table-cell table:style-name="ce373" table:formula="of:=IF([.A324]=0;0;([.$C$2]-[.F324]))" office:value-type="float" office:value="0" calcext:value-type="float">
            <text:p>0.00</text:p>
          </table:table-cell>
          <table:table-cell table:style-name="ce373" table:formula="of:=IF([.A324]=0;0;([.B324]+[.F32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4]&gt;=[.$C$4];0;IF([.A324]=0;0;(1+[.A324])))" office:value-type="float" office:value="0" calcext:value-type="float">
            <text:p>0</text:p>
          </table:table-cell>
          <table:table-cell table:style-name="ce373" table:formula="of:=IF([.A325]=0;0;(PPMT([.$C$3];[.A325];[.$C$4];-[.$C$2])))" office:value-type="float" office:value="0" calcext:value-type="float">
            <text:p>0.00</text:p>
          </table:table-cell>
          <table:table-cell table:style-name="ce373" table:formula="of:=IF([.A325]=0;0;(IPMT([.$C$3];[.A325];[.$C$4];-[.$C$2])))" office:value-type="float" office:value="0" calcext:value-type="float">
            <text:p>0.00</text:p>
          </table:table-cell>
          <table:table-cell table:style-name="ce373" table:formula="of:=IF([.A325]=0;0;(PMT([.$C$3];[.$C$4];-[.$C$2])))" office:value-type="float" office:value="0" calcext:value-type="float">
            <text:p>0.00</text:p>
          </table:table-cell>
          <table:table-cell table:style-name="ce373" table:formula="of:=IF([.A325]=0;0;([.$C$2]-[.F325]))" office:value-type="float" office:value="0" calcext:value-type="float">
            <text:p>0.00</text:p>
          </table:table-cell>
          <table:table-cell table:style-name="ce373" table:formula="of:=IF([.A325]=0;0;([.B325]+[.F32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5]&gt;=[.$C$4];0;IF([.A325]=0;0;(1+[.A325])))" office:value-type="float" office:value="0" calcext:value-type="float">
            <text:p>0</text:p>
          </table:table-cell>
          <table:table-cell table:style-name="ce373" table:formula="of:=IF([.A326]=0;0;(PPMT([.$C$3];[.A326];[.$C$4];-[.$C$2])))" office:value-type="float" office:value="0" calcext:value-type="float">
            <text:p>0.00</text:p>
          </table:table-cell>
          <table:table-cell table:style-name="ce373" table:formula="of:=IF([.A326]=0;0;(IPMT([.$C$3];[.A326];[.$C$4];-[.$C$2])))" office:value-type="float" office:value="0" calcext:value-type="float">
            <text:p>0.00</text:p>
          </table:table-cell>
          <table:table-cell table:style-name="ce373" table:formula="of:=IF([.A326]=0;0;(PMT([.$C$3];[.$C$4];-[.$C$2])))" office:value-type="float" office:value="0" calcext:value-type="float">
            <text:p>0.00</text:p>
          </table:table-cell>
          <table:table-cell table:style-name="ce373" table:formula="of:=IF([.A326]=0;0;([.$C$2]-[.F326]))" office:value-type="float" office:value="0" calcext:value-type="float">
            <text:p>0.00</text:p>
          </table:table-cell>
          <table:table-cell table:style-name="ce373" table:formula="of:=IF([.A326]=0;0;([.B326]+[.F32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6]&gt;=[.$C$4];0;IF([.A326]=0;0;(1+[.A326])))" office:value-type="float" office:value="0" calcext:value-type="float">
            <text:p>0</text:p>
          </table:table-cell>
          <table:table-cell table:style-name="ce373" table:formula="of:=IF([.A327]=0;0;(PPMT([.$C$3];[.A327];[.$C$4];-[.$C$2])))" office:value-type="float" office:value="0" calcext:value-type="float">
            <text:p>0.00</text:p>
          </table:table-cell>
          <table:table-cell table:style-name="ce373" table:formula="of:=IF([.A327]=0;0;(IPMT([.$C$3];[.A327];[.$C$4];-[.$C$2])))" office:value-type="float" office:value="0" calcext:value-type="float">
            <text:p>0.00</text:p>
          </table:table-cell>
          <table:table-cell table:style-name="ce373" table:formula="of:=IF([.A327]=0;0;(PMT([.$C$3];[.$C$4];-[.$C$2])))" office:value-type="float" office:value="0" calcext:value-type="float">
            <text:p>0.00</text:p>
          </table:table-cell>
          <table:table-cell table:style-name="ce373" table:formula="of:=IF([.A327]=0;0;([.$C$2]-[.F327]))" office:value-type="float" office:value="0" calcext:value-type="float">
            <text:p>0.00</text:p>
          </table:table-cell>
          <table:table-cell table:style-name="ce373" table:formula="of:=IF([.A327]=0;0;([.B327]+[.F32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7]&gt;=[.$C$4];0;IF([.A327]=0;0;(1+[.A327])))" office:value-type="float" office:value="0" calcext:value-type="float">
            <text:p>0</text:p>
          </table:table-cell>
          <table:table-cell table:style-name="ce373" table:formula="of:=IF([.A328]=0;0;(PPMT([.$C$3];[.A328];[.$C$4];-[.$C$2])))" office:value-type="float" office:value="0" calcext:value-type="float">
            <text:p>0.00</text:p>
          </table:table-cell>
          <table:table-cell table:style-name="ce373" table:formula="of:=IF([.A328]=0;0;(IPMT([.$C$3];[.A328];[.$C$4];-[.$C$2])))" office:value-type="float" office:value="0" calcext:value-type="float">
            <text:p>0.00</text:p>
          </table:table-cell>
          <table:table-cell table:style-name="ce373" table:formula="of:=IF([.A328]=0;0;(PMT([.$C$3];[.$C$4];-[.$C$2])))" office:value-type="float" office:value="0" calcext:value-type="float">
            <text:p>0.00</text:p>
          </table:table-cell>
          <table:table-cell table:style-name="ce373" table:formula="of:=IF([.A328]=0;0;([.$C$2]-[.F328]))" office:value-type="float" office:value="0" calcext:value-type="float">
            <text:p>0.00</text:p>
          </table:table-cell>
          <table:table-cell table:style-name="ce373" table:formula="of:=IF([.A328]=0;0;([.B328]+[.F32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8]&gt;=[.$C$4];0;IF([.A328]=0;0;(1+[.A328])))" office:value-type="float" office:value="0" calcext:value-type="float">
            <text:p>0</text:p>
          </table:table-cell>
          <table:table-cell table:style-name="ce373" table:formula="of:=IF([.A329]=0;0;(PPMT([.$C$3];[.A329];[.$C$4];-[.$C$2])))" office:value-type="float" office:value="0" calcext:value-type="float">
            <text:p>0.00</text:p>
          </table:table-cell>
          <table:table-cell table:style-name="ce373" table:formula="of:=IF([.A329]=0;0;(IPMT([.$C$3];[.A329];[.$C$4];-[.$C$2])))" office:value-type="float" office:value="0" calcext:value-type="float">
            <text:p>0.00</text:p>
          </table:table-cell>
          <table:table-cell table:style-name="ce373" table:formula="of:=IF([.A329]=0;0;(PMT([.$C$3];[.$C$4];-[.$C$2])))" office:value-type="float" office:value="0" calcext:value-type="float">
            <text:p>0.00</text:p>
          </table:table-cell>
          <table:table-cell table:style-name="ce373" table:formula="of:=IF([.A329]=0;0;([.$C$2]-[.F329]))" office:value-type="float" office:value="0" calcext:value-type="float">
            <text:p>0.00</text:p>
          </table:table-cell>
          <table:table-cell table:style-name="ce373" table:formula="of:=IF([.A329]=0;0;([.B329]+[.F32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29]&gt;=[.$C$4];0;IF([.A329]=0;0;(1+[.A329])))" office:value-type="float" office:value="0" calcext:value-type="float">
            <text:p>0</text:p>
          </table:table-cell>
          <table:table-cell table:style-name="ce373" table:formula="of:=IF([.A330]=0;0;(PPMT([.$C$3];[.A330];[.$C$4];-[.$C$2])))" office:value-type="float" office:value="0" calcext:value-type="float">
            <text:p>0.00</text:p>
          </table:table-cell>
          <table:table-cell table:style-name="ce373" table:formula="of:=IF([.A330]=0;0;(IPMT([.$C$3];[.A330];[.$C$4];-[.$C$2])))" office:value-type="float" office:value="0" calcext:value-type="float">
            <text:p>0.00</text:p>
          </table:table-cell>
          <table:table-cell table:style-name="ce373" table:formula="of:=IF([.A330]=0;0;(PMT([.$C$3];[.$C$4];-[.$C$2])))" office:value-type="float" office:value="0" calcext:value-type="float">
            <text:p>0.00</text:p>
          </table:table-cell>
          <table:table-cell table:style-name="ce373" table:formula="of:=IF([.A330]=0;0;([.$C$2]-[.F330]))" office:value-type="float" office:value="0" calcext:value-type="float">
            <text:p>0.00</text:p>
          </table:table-cell>
          <table:table-cell table:style-name="ce373" table:formula="of:=IF([.A330]=0;0;([.B330]+[.F32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0]&gt;=[.$C$4];0;IF([.A330]=0;0;(1+[.A330])))" office:value-type="float" office:value="0" calcext:value-type="float">
            <text:p>0</text:p>
          </table:table-cell>
          <table:table-cell table:style-name="ce373" table:formula="of:=IF([.A331]=0;0;(PPMT([.$C$3];[.A331];[.$C$4];-[.$C$2])))" office:value-type="float" office:value="0" calcext:value-type="float">
            <text:p>0.00</text:p>
          </table:table-cell>
          <table:table-cell table:style-name="ce373" table:formula="of:=IF([.A331]=0;0;(IPMT([.$C$3];[.A331];[.$C$4];-[.$C$2])))" office:value-type="float" office:value="0" calcext:value-type="float">
            <text:p>0.00</text:p>
          </table:table-cell>
          <table:table-cell table:style-name="ce373" table:formula="of:=IF([.A331]=0;0;(PMT([.$C$3];[.$C$4];-[.$C$2])))" office:value-type="float" office:value="0" calcext:value-type="float">
            <text:p>0.00</text:p>
          </table:table-cell>
          <table:table-cell table:style-name="ce373" table:formula="of:=IF([.A331]=0;0;([.$C$2]-[.F331]))" office:value-type="float" office:value="0" calcext:value-type="float">
            <text:p>0.00</text:p>
          </table:table-cell>
          <table:table-cell table:style-name="ce373" table:formula="of:=IF([.A331]=0;0;([.B331]+[.F33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1]&gt;=[.$C$4];0;IF([.A331]=0;0;(1+[.A331])))" office:value-type="float" office:value="0" calcext:value-type="float">
            <text:p>0</text:p>
          </table:table-cell>
          <table:table-cell table:style-name="ce373" table:formula="of:=IF([.A332]=0;0;(PPMT([.$C$3];[.A332];[.$C$4];-[.$C$2])))" office:value-type="float" office:value="0" calcext:value-type="float">
            <text:p>0.00</text:p>
          </table:table-cell>
          <table:table-cell table:style-name="ce373" table:formula="of:=IF([.A332]=0;0;(IPMT([.$C$3];[.A332];[.$C$4];-[.$C$2])))" office:value-type="float" office:value="0" calcext:value-type="float">
            <text:p>0.00</text:p>
          </table:table-cell>
          <table:table-cell table:style-name="ce373" table:formula="of:=IF([.A332]=0;0;(PMT([.$C$3];[.$C$4];-[.$C$2])))" office:value-type="float" office:value="0" calcext:value-type="float">
            <text:p>0.00</text:p>
          </table:table-cell>
          <table:table-cell table:style-name="ce373" table:formula="of:=IF([.A332]=0;0;([.$C$2]-[.F332]))" office:value-type="float" office:value="0" calcext:value-type="float">
            <text:p>0.00</text:p>
          </table:table-cell>
          <table:table-cell table:style-name="ce373" table:formula="of:=IF([.A332]=0;0;([.B332]+[.F33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2]&gt;=[.$C$4];0;IF([.A332]=0;0;(1+[.A332])))" office:value-type="float" office:value="0" calcext:value-type="float">
            <text:p>0</text:p>
          </table:table-cell>
          <table:table-cell table:style-name="ce373" table:formula="of:=IF([.A333]=0;0;(PPMT([.$C$3];[.A333];[.$C$4];-[.$C$2])))" office:value-type="float" office:value="0" calcext:value-type="float">
            <text:p>0.00</text:p>
          </table:table-cell>
          <table:table-cell table:style-name="ce373" table:formula="of:=IF([.A333]=0;0;(IPMT([.$C$3];[.A333];[.$C$4];-[.$C$2])))" office:value-type="float" office:value="0" calcext:value-type="float">
            <text:p>0.00</text:p>
          </table:table-cell>
          <table:table-cell table:style-name="ce373" table:formula="of:=IF([.A333]=0;0;(PMT([.$C$3];[.$C$4];-[.$C$2])))" office:value-type="float" office:value="0" calcext:value-type="float">
            <text:p>0.00</text:p>
          </table:table-cell>
          <table:table-cell table:style-name="ce373" table:formula="of:=IF([.A333]=0;0;([.$C$2]-[.F333]))" office:value-type="float" office:value="0" calcext:value-type="float">
            <text:p>0.00</text:p>
          </table:table-cell>
          <table:table-cell table:style-name="ce373" table:formula="of:=IF([.A333]=0;0;([.B333]+[.F33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3]&gt;=[.$C$4];0;IF([.A333]=0;0;(1+[.A333])))" office:value-type="float" office:value="0" calcext:value-type="float">
            <text:p>0</text:p>
          </table:table-cell>
          <table:table-cell table:style-name="ce373" table:formula="of:=IF([.A334]=0;0;(PPMT([.$C$3];[.A334];[.$C$4];-[.$C$2])))" office:value-type="float" office:value="0" calcext:value-type="float">
            <text:p>0.00</text:p>
          </table:table-cell>
          <table:table-cell table:style-name="ce373" table:formula="of:=IF([.A334]=0;0;(IPMT([.$C$3];[.A334];[.$C$4];-[.$C$2])))" office:value-type="float" office:value="0" calcext:value-type="float">
            <text:p>0.00</text:p>
          </table:table-cell>
          <table:table-cell table:style-name="ce373" table:formula="of:=IF([.A334]=0;0;(PMT([.$C$3];[.$C$4];-[.$C$2])))" office:value-type="float" office:value="0" calcext:value-type="float">
            <text:p>0.00</text:p>
          </table:table-cell>
          <table:table-cell table:style-name="ce373" table:formula="of:=IF([.A334]=0;0;([.$C$2]-[.F334]))" office:value-type="float" office:value="0" calcext:value-type="float">
            <text:p>0.00</text:p>
          </table:table-cell>
          <table:table-cell table:style-name="ce373" table:formula="of:=IF([.A334]=0;0;([.B334]+[.F33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4]&gt;=[.$C$4];0;IF([.A334]=0;0;(1+[.A334])))" office:value-type="float" office:value="0" calcext:value-type="float">
            <text:p>0</text:p>
          </table:table-cell>
          <table:table-cell table:style-name="ce373" table:formula="of:=IF([.A335]=0;0;(PPMT([.$C$3];[.A335];[.$C$4];-[.$C$2])))" office:value-type="float" office:value="0" calcext:value-type="float">
            <text:p>0.00</text:p>
          </table:table-cell>
          <table:table-cell table:style-name="ce373" table:formula="of:=IF([.A335]=0;0;(IPMT([.$C$3];[.A335];[.$C$4];-[.$C$2])))" office:value-type="float" office:value="0" calcext:value-type="float">
            <text:p>0.00</text:p>
          </table:table-cell>
          <table:table-cell table:style-name="ce373" table:formula="of:=IF([.A335]=0;0;(PMT([.$C$3];[.$C$4];-[.$C$2])))" office:value-type="float" office:value="0" calcext:value-type="float">
            <text:p>0.00</text:p>
          </table:table-cell>
          <table:table-cell table:style-name="ce373" table:formula="of:=IF([.A335]=0;0;([.$C$2]-[.F335]))" office:value-type="float" office:value="0" calcext:value-type="float">
            <text:p>0.00</text:p>
          </table:table-cell>
          <table:table-cell table:style-name="ce373" table:formula="of:=IF([.A335]=0;0;([.B335]+[.F33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5]&gt;=[.$C$4];0;IF([.A335]=0;0;(1+[.A335])))" office:value-type="float" office:value="0" calcext:value-type="float">
            <text:p>0</text:p>
          </table:table-cell>
          <table:table-cell table:style-name="ce373" table:formula="of:=IF([.A336]=0;0;(PPMT([.$C$3];[.A336];[.$C$4];-[.$C$2])))" office:value-type="float" office:value="0" calcext:value-type="float">
            <text:p>0.00</text:p>
          </table:table-cell>
          <table:table-cell table:style-name="ce373" table:formula="of:=IF([.A336]=0;0;(IPMT([.$C$3];[.A336];[.$C$4];-[.$C$2])))" office:value-type="float" office:value="0" calcext:value-type="float">
            <text:p>0.00</text:p>
          </table:table-cell>
          <table:table-cell table:style-name="ce373" table:formula="of:=IF([.A336]=0;0;(PMT([.$C$3];[.$C$4];-[.$C$2])))" office:value-type="float" office:value="0" calcext:value-type="float">
            <text:p>0.00</text:p>
          </table:table-cell>
          <table:table-cell table:style-name="ce373" table:formula="of:=IF([.A336]=0;0;([.$C$2]-[.F336]))" office:value-type="float" office:value="0" calcext:value-type="float">
            <text:p>0.00</text:p>
          </table:table-cell>
          <table:table-cell table:style-name="ce373" table:formula="of:=IF([.A336]=0;0;([.B336]+[.F33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6]&gt;=[.$C$4];0;IF([.A336]=0;0;(1+[.A336])))" office:value-type="float" office:value="0" calcext:value-type="float">
            <text:p>0</text:p>
          </table:table-cell>
          <table:table-cell table:style-name="ce373" table:formula="of:=IF([.A337]=0;0;(PPMT([.$C$3];[.A337];[.$C$4];-[.$C$2])))" office:value-type="float" office:value="0" calcext:value-type="float">
            <text:p>0.00</text:p>
          </table:table-cell>
          <table:table-cell table:style-name="ce373" table:formula="of:=IF([.A337]=0;0;(IPMT([.$C$3];[.A337];[.$C$4];-[.$C$2])))" office:value-type="float" office:value="0" calcext:value-type="float">
            <text:p>0.00</text:p>
          </table:table-cell>
          <table:table-cell table:style-name="ce373" table:formula="of:=IF([.A337]=0;0;(PMT([.$C$3];[.$C$4];-[.$C$2])))" office:value-type="float" office:value="0" calcext:value-type="float">
            <text:p>0.00</text:p>
          </table:table-cell>
          <table:table-cell table:style-name="ce373" table:formula="of:=IF([.A337]=0;0;([.$C$2]-[.F337]))" office:value-type="float" office:value="0" calcext:value-type="float">
            <text:p>0.00</text:p>
          </table:table-cell>
          <table:table-cell table:style-name="ce373" table:formula="of:=IF([.A337]=0;0;([.B337]+[.F33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7]&gt;=[.$C$4];0;IF([.A337]=0;0;(1+[.A337])))" office:value-type="float" office:value="0" calcext:value-type="float">
            <text:p>0</text:p>
          </table:table-cell>
          <table:table-cell table:style-name="ce373" table:formula="of:=IF([.A338]=0;0;(PPMT([.$C$3];[.A338];[.$C$4];-[.$C$2])))" office:value-type="float" office:value="0" calcext:value-type="float">
            <text:p>0.00</text:p>
          </table:table-cell>
          <table:table-cell table:style-name="ce373" table:formula="of:=IF([.A338]=0;0;(IPMT([.$C$3];[.A338];[.$C$4];-[.$C$2])))" office:value-type="float" office:value="0" calcext:value-type="float">
            <text:p>0.00</text:p>
          </table:table-cell>
          <table:table-cell table:style-name="ce373" table:formula="of:=IF([.A338]=0;0;(PMT([.$C$3];[.$C$4];-[.$C$2])))" office:value-type="float" office:value="0" calcext:value-type="float">
            <text:p>0.00</text:p>
          </table:table-cell>
          <table:table-cell table:style-name="ce373" table:formula="of:=IF([.A338]=0;0;([.$C$2]-[.F338]))" office:value-type="float" office:value="0" calcext:value-type="float">
            <text:p>0.00</text:p>
          </table:table-cell>
          <table:table-cell table:style-name="ce373" table:formula="of:=IF([.A338]=0;0;([.B338]+[.F33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8]&gt;=[.$C$4];0;IF([.A338]=0;0;(1+[.A338])))" office:value-type="float" office:value="0" calcext:value-type="float">
            <text:p>0</text:p>
          </table:table-cell>
          <table:table-cell table:style-name="ce373" table:formula="of:=IF([.A339]=0;0;(PPMT([.$C$3];[.A339];[.$C$4];-[.$C$2])))" office:value-type="float" office:value="0" calcext:value-type="float">
            <text:p>0.00</text:p>
          </table:table-cell>
          <table:table-cell table:style-name="ce373" table:formula="of:=IF([.A339]=0;0;(IPMT([.$C$3];[.A339];[.$C$4];-[.$C$2])))" office:value-type="float" office:value="0" calcext:value-type="float">
            <text:p>0.00</text:p>
          </table:table-cell>
          <table:table-cell table:style-name="ce373" table:formula="of:=IF([.A339]=0;0;(PMT([.$C$3];[.$C$4];-[.$C$2])))" office:value-type="float" office:value="0" calcext:value-type="float">
            <text:p>0.00</text:p>
          </table:table-cell>
          <table:table-cell table:style-name="ce373" table:formula="of:=IF([.A339]=0;0;([.$C$2]-[.F339]))" office:value-type="float" office:value="0" calcext:value-type="float">
            <text:p>0.00</text:p>
          </table:table-cell>
          <table:table-cell table:style-name="ce373" table:formula="of:=IF([.A339]=0;0;([.B339]+[.F33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39]&gt;=[.$C$4];0;IF([.A339]=0;0;(1+[.A339])))" office:value-type="float" office:value="0" calcext:value-type="float">
            <text:p>0</text:p>
          </table:table-cell>
          <table:table-cell table:style-name="ce373" table:formula="of:=IF([.A340]=0;0;(PPMT([.$C$3];[.A340];[.$C$4];-[.$C$2])))" office:value-type="float" office:value="0" calcext:value-type="float">
            <text:p>0.00</text:p>
          </table:table-cell>
          <table:table-cell table:style-name="ce373" table:formula="of:=IF([.A340]=0;0;(IPMT([.$C$3];[.A340];[.$C$4];-[.$C$2])))" office:value-type="float" office:value="0" calcext:value-type="float">
            <text:p>0.00</text:p>
          </table:table-cell>
          <table:table-cell table:style-name="ce373" table:formula="of:=IF([.A340]=0;0;(PMT([.$C$3];[.$C$4];-[.$C$2])))" office:value-type="float" office:value="0" calcext:value-type="float">
            <text:p>0.00</text:p>
          </table:table-cell>
          <table:table-cell table:style-name="ce373" table:formula="of:=IF([.A340]=0;0;([.$C$2]-[.F340]))" office:value-type="float" office:value="0" calcext:value-type="float">
            <text:p>0.00</text:p>
          </table:table-cell>
          <table:table-cell table:style-name="ce373" table:formula="of:=IF([.A340]=0;0;([.B340]+[.F33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0]&gt;=[.$C$4];0;IF([.A340]=0;0;(1+[.A340])))" office:value-type="float" office:value="0" calcext:value-type="float">
            <text:p>0</text:p>
          </table:table-cell>
          <table:table-cell table:style-name="ce373" table:formula="of:=IF([.A341]=0;0;(PPMT([.$C$3];[.A341];[.$C$4];-[.$C$2])))" office:value-type="float" office:value="0" calcext:value-type="float">
            <text:p>0.00</text:p>
          </table:table-cell>
          <table:table-cell table:style-name="ce373" table:formula="of:=IF([.A341]=0;0;(IPMT([.$C$3];[.A341];[.$C$4];-[.$C$2])))" office:value-type="float" office:value="0" calcext:value-type="float">
            <text:p>0.00</text:p>
          </table:table-cell>
          <table:table-cell table:style-name="ce373" table:formula="of:=IF([.A341]=0;0;(PMT([.$C$3];[.$C$4];-[.$C$2])))" office:value-type="float" office:value="0" calcext:value-type="float">
            <text:p>0.00</text:p>
          </table:table-cell>
          <table:table-cell table:style-name="ce373" table:formula="of:=IF([.A341]=0;0;([.$C$2]-[.F341]))" office:value-type="float" office:value="0" calcext:value-type="float">
            <text:p>0.00</text:p>
          </table:table-cell>
          <table:table-cell table:style-name="ce373" table:formula="of:=IF([.A341]=0;0;([.B341]+[.F34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1]&gt;=[.$C$4];0;IF([.A341]=0;0;(1+[.A341])))" office:value-type="float" office:value="0" calcext:value-type="float">
            <text:p>0</text:p>
          </table:table-cell>
          <table:table-cell table:style-name="ce373" table:formula="of:=IF([.A342]=0;0;(PPMT([.$C$3];[.A342];[.$C$4];-[.$C$2])))" office:value-type="float" office:value="0" calcext:value-type="float">
            <text:p>0.00</text:p>
          </table:table-cell>
          <table:table-cell table:style-name="ce373" table:formula="of:=IF([.A342]=0;0;(IPMT([.$C$3];[.A342];[.$C$4];-[.$C$2])))" office:value-type="float" office:value="0" calcext:value-type="float">
            <text:p>0.00</text:p>
          </table:table-cell>
          <table:table-cell table:style-name="ce373" table:formula="of:=IF([.A342]=0;0;(PMT([.$C$3];[.$C$4];-[.$C$2])))" office:value-type="float" office:value="0" calcext:value-type="float">
            <text:p>0.00</text:p>
          </table:table-cell>
          <table:table-cell table:style-name="ce373" table:formula="of:=IF([.A342]=0;0;([.$C$2]-[.F342]))" office:value-type="float" office:value="0" calcext:value-type="float">
            <text:p>0.00</text:p>
          </table:table-cell>
          <table:table-cell table:style-name="ce373" table:formula="of:=IF([.A342]=0;0;([.B342]+[.F34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2]&gt;=[.$C$4];0;IF([.A342]=0;0;(1+[.A342])))" office:value-type="float" office:value="0" calcext:value-type="float">
            <text:p>0</text:p>
          </table:table-cell>
          <table:table-cell table:style-name="ce373" table:formula="of:=IF([.A343]=0;0;(PPMT([.$C$3];[.A343];[.$C$4];-[.$C$2])))" office:value-type="float" office:value="0" calcext:value-type="float">
            <text:p>0.00</text:p>
          </table:table-cell>
          <table:table-cell table:style-name="ce373" table:formula="of:=IF([.A343]=0;0;(IPMT([.$C$3];[.A343];[.$C$4];-[.$C$2])))" office:value-type="float" office:value="0" calcext:value-type="float">
            <text:p>0.00</text:p>
          </table:table-cell>
          <table:table-cell table:style-name="ce373" table:formula="of:=IF([.A343]=0;0;(PMT([.$C$3];[.$C$4];-[.$C$2])))" office:value-type="float" office:value="0" calcext:value-type="float">
            <text:p>0.00</text:p>
          </table:table-cell>
          <table:table-cell table:style-name="ce373" table:formula="of:=IF([.A343]=0;0;([.$C$2]-[.F343]))" office:value-type="float" office:value="0" calcext:value-type="float">
            <text:p>0.00</text:p>
          </table:table-cell>
          <table:table-cell table:style-name="ce373" table:formula="of:=IF([.A343]=0;0;([.B343]+[.F34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3]&gt;=[.$C$4];0;IF([.A343]=0;0;(1+[.A343])))" office:value-type="float" office:value="0" calcext:value-type="float">
            <text:p>0</text:p>
          </table:table-cell>
          <table:table-cell table:style-name="ce373" table:formula="of:=IF([.A344]=0;0;(PPMT([.$C$3];[.A344];[.$C$4];-[.$C$2])))" office:value-type="float" office:value="0" calcext:value-type="float">
            <text:p>0.00</text:p>
          </table:table-cell>
          <table:table-cell table:style-name="ce373" table:formula="of:=IF([.A344]=0;0;(IPMT([.$C$3];[.A344];[.$C$4];-[.$C$2])))" office:value-type="float" office:value="0" calcext:value-type="float">
            <text:p>0.00</text:p>
          </table:table-cell>
          <table:table-cell table:style-name="ce373" table:formula="of:=IF([.A344]=0;0;(PMT([.$C$3];[.$C$4];-[.$C$2])))" office:value-type="float" office:value="0" calcext:value-type="float">
            <text:p>0.00</text:p>
          </table:table-cell>
          <table:table-cell table:style-name="ce373" table:formula="of:=IF([.A344]=0;0;([.$C$2]-[.F344]))" office:value-type="float" office:value="0" calcext:value-type="float">
            <text:p>0.00</text:p>
          </table:table-cell>
          <table:table-cell table:style-name="ce373" table:formula="of:=IF([.A344]=0;0;([.B344]+[.F34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4]&gt;=[.$C$4];0;IF([.A344]=0;0;(1+[.A344])))" office:value-type="float" office:value="0" calcext:value-type="float">
            <text:p>0</text:p>
          </table:table-cell>
          <table:table-cell table:style-name="ce373" table:formula="of:=IF([.A345]=0;0;(PPMT([.$C$3];[.A345];[.$C$4];-[.$C$2])))" office:value-type="float" office:value="0" calcext:value-type="float">
            <text:p>0.00</text:p>
          </table:table-cell>
          <table:table-cell table:style-name="ce373" table:formula="of:=IF([.A345]=0;0;(IPMT([.$C$3];[.A345];[.$C$4];-[.$C$2])))" office:value-type="float" office:value="0" calcext:value-type="float">
            <text:p>0.00</text:p>
          </table:table-cell>
          <table:table-cell table:style-name="ce373" table:formula="of:=IF([.A345]=0;0;(PMT([.$C$3];[.$C$4];-[.$C$2])))" office:value-type="float" office:value="0" calcext:value-type="float">
            <text:p>0.00</text:p>
          </table:table-cell>
          <table:table-cell table:style-name="ce373" table:formula="of:=IF([.A345]=0;0;([.$C$2]-[.F345]))" office:value-type="float" office:value="0" calcext:value-type="float">
            <text:p>0.00</text:p>
          </table:table-cell>
          <table:table-cell table:style-name="ce373" table:formula="of:=IF([.A345]=0;0;([.B345]+[.F34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5]&gt;=[.$C$4];0;IF([.A345]=0;0;(1+[.A345])))" office:value-type="float" office:value="0" calcext:value-type="float">
            <text:p>0</text:p>
          </table:table-cell>
          <table:table-cell table:style-name="ce373" table:formula="of:=IF([.A346]=0;0;(PPMT([.$C$3];[.A346];[.$C$4];-[.$C$2])))" office:value-type="float" office:value="0" calcext:value-type="float">
            <text:p>0.00</text:p>
          </table:table-cell>
          <table:table-cell table:style-name="ce373" table:formula="of:=IF([.A346]=0;0;(IPMT([.$C$3];[.A346];[.$C$4];-[.$C$2])))" office:value-type="float" office:value="0" calcext:value-type="float">
            <text:p>0.00</text:p>
          </table:table-cell>
          <table:table-cell table:style-name="ce373" table:formula="of:=IF([.A346]=0;0;(PMT([.$C$3];[.$C$4];-[.$C$2])))" office:value-type="float" office:value="0" calcext:value-type="float">
            <text:p>0.00</text:p>
          </table:table-cell>
          <table:table-cell table:style-name="ce373" table:formula="of:=IF([.A346]=0;0;([.$C$2]-[.F346]))" office:value-type="float" office:value="0" calcext:value-type="float">
            <text:p>0.00</text:p>
          </table:table-cell>
          <table:table-cell table:style-name="ce373" table:formula="of:=IF([.A346]=0;0;([.B346]+[.F34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6]&gt;=[.$C$4];0;IF([.A346]=0;0;(1+[.A346])))" office:value-type="float" office:value="0" calcext:value-type="float">
            <text:p>0</text:p>
          </table:table-cell>
          <table:table-cell table:style-name="ce373" table:formula="of:=IF([.A347]=0;0;(PPMT([.$C$3];[.A347];[.$C$4];-[.$C$2])))" office:value-type="float" office:value="0" calcext:value-type="float">
            <text:p>0.00</text:p>
          </table:table-cell>
          <table:table-cell table:style-name="ce373" table:formula="of:=IF([.A347]=0;0;(IPMT([.$C$3];[.A347];[.$C$4];-[.$C$2])))" office:value-type="float" office:value="0" calcext:value-type="float">
            <text:p>0.00</text:p>
          </table:table-cell>
          <table:table-cell table:style-name="ce373" table:formula="of:=IF([.A347]=0;0;(PMT([.$C$3];[.$C$4];-[.$C$2])))" office:value-type="float" office:value="0" calcext:value-type="float">
            <text:p>0.00</text:p>
          </table:table-cell>
          <table:table-cell table:style-name="ce373" table:formula="of:=IF([.A347]=0;0;([.$C$2]-[.F347]))" office:value-type="float" office:value="0" calcext:value-type="float">
            <text:p>0.00</text:p>
          </table:table-cell>
          <table:table-cell table:style-name="ce373" table:formula="of:=IF([.A347]=0;0;([.B347]+[.F34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7]&gt;=[.$C$4];0;IF([.A347]=0;0;(1+[.A347])))" office:value-type="float" office:value="0" calcext:value-type="float">
            <text:p>0</text:p>
          </table:table-cell>
          <table:table-cell table:style-name="ce373" table:formula="of:=IF([.A348]=0;0;(PPMT([.$C$3];[.A348];[.$C$4];-[.$C$2])))" office:value-type="float" office:value="0" calcext:value-type="float">
            <text:p>0.00</text:p>
          </table:table-cell>
          <table:table-cell table:style-name="ce373" table:formula="of:=IF([.A348]=0;0;(IPMT([.$C$3];[.A348];[.$C$4];-[.$C$2])))" office:value-type="float" office:value="0" calcext:value-type="float">
            <text:p>0.00</text:p>
          </table:table-cell>
          <table:table-cell table:style-name="ce373" table:formula="of:=IF([.A348]=0;0;(PMT([.$C$3];[.$C$4];-[.$C$2])))" office:value-type="float" office:value="0" calcext:value-type="float">
            <text:p>0.00</text:p>
          </table:table-cell>
          <table:table-cell table:style-name="ce373" table:formula="of:=IF([.A348]=0;0;([.$C$2]-[.F348]))" office:value-type="float" office:value="0" calcext:value-type="float">
            <text:p>0.00</text:p>
          </table:table-cell>
          <table:table-cell table:style-name="ce373" table:formula="of:=IF([.A348]=0;0;([.B348]+[.F34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8]&gt;=[.$C$4];0;IF([.A348]=0;0;(1+[.A348])))" office:value-type="float" office:value="0" calcext:value-type="float">
            <text:p>0</text:p>
          </table:table-cell>
          <table:table-cell table:style-name="ce373" table:formula="of:=IF([.A349]=0;0;(PPMT([.$C$3];[.A349];[.$C$4];-[.$C$2])))" office:value-type="float" office:value="0" calcext:value-type="float">
            <text:p>0.00</text:p>
          </table:table-cell>
          <table:table-cell table:style-name="ce373" table:formula="of:=IF([.A349]=0;0;(IPMT([.$C$3];[.A349];[.$C$4];-[.$C$2])))" office:value-type="float" office:value="0" calcext:value-type="float">
            <text:p>0.00</text:p>
          </table:table-cell>
          <table:table-cell table:style-name="ce373" table:formula="of:=IF([.A349]=0;0;(PMT([.$C$3];[.$C$4];-[.$C$2])))" office:value-type="float" office:value="0" calcext:value-type="float">
            <text:p>0.00</text:p>
          </table:table-cell>
          <table:table-cell table:style-name="ce373" table:formula="of:=IF([.A349]=0;0;([.$C$2]-[.F349]))" office:value-type="float" office:value="0" calcext:value-type="float">
            <text:p>0.00</text:p>
          </table:table-cell>
          <table:table-cell table:style-name="ce373" table:formula="of:=IF([.A349]=0;0;([.B349]+[.F34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49]&gt;=[.$C$4];0;IF([.A349]=0;0;(1+[.A349])))" office:value-type="float" office:value="0" calcext:value-type="float">
            <text:p>0</text:p>
          </table:table-cell>
          <table:table-cell table:style-name="ce373" table:formula="of:=IF([.A350]=0;0;(PPMT([.$C$3];[.A350];[.$C$4];-[.$C$2])))" office:value-type="float" office:value="0" calcext:value-type="float">
            <text:p>0.00</text:p>
          </table:table-cell>
          <table:table-cell table:style-name="ce373" table:formula="of:=IF([.A350]=0;0;(IPMT([.$C$3];[.A350];[.$C$4];-[.$C$2])))" office:value-type="float" office:value="0" calcext:value-type="float">
            <text:p>0.00</text:p>
          </table:table-cell>
          <table:table-cell table:style-name="ce373" table:formula="of:=IF([.A350]=0;0;(PMT([.$C$3];[.$C$4];-[.$C$2])))" office:value-type="float" office:value="0" calcext:value-type="float">
            <text:p>0.00</text:p>
          </table:table-cell>
          <table:table-cell table:style-name="ce373" table:formula="of:=IF([.A350]=0;0;([.$C$2]-[.F350]))" office:value-type="float" office:value="0" calcext:value-type="float">
            <text:p>0.00</text:p>
          </table:table-cell>
          <table:table-cell table:style-name="ce373" table:formula="of:=IF([.A350]=0;0;([.B350]+[.F34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0]&gt;=[.$C$4];0;IF([.A350]=0;0;(1+[.A350])))" office:value-type="float" office:value="0" calcext:value-type="float">
            <text:p>0</text:p>
          </table:table-cell>
          <table:table-cell table:style-name="ce373" table:formula="of:=IF([.A351]=0;0;(PPMT([.$C$3];[.A351];[.$C$4];-[.$C$2])))" office:value-type="float" office:value="0" calcext:value-type="float">
            <text:p>0.00</text:p>
          </table:table-cell>
          <table:table-cell table:style-name="ce373" table:formula="of:=IF([.A351]=0;0;(IPMT([.$C$3];[.A351];[.$C$4];-[.$C$2])))" office:value-type="float" office:value="0" calcext:value-type="float">
            <text:p>0.00</text:p>
          </table:table-cell>
          <table:table-cell table:style-name="ce373" table:formula="of:=IF([.A351]=0;0;(PMT([.$C$3];[.$C$4];-[.$C$2])))" office:value-type="float" office:value="0" calcext:value-type="float">
            <text:p>0.00</text:p>
          </table:table-cell>
          <table:table-cell table:style-name="ce373" table:formula="of:=IF([.A351]=0;0;([.$C$2]-[.F351]))" office:value-type="float" office:value="0" calcext:value-type="float">
            <text:p>0.00</text:p>
          </table:table-cell>
          <table:table-cell table:style-name="ce373" table:formula="of:=IF([.A351]=0;0;([.B351]+[.F35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1]&gt;=[.$C$4];0;IF([.A351]=0;0;(1+[.A351])))" office:value-type="float" office:value="0" calcext:value-type="float">
            <text:p>0</text:p>
          </table:table-cell>
          <table:table-cell table:style-name="ce373" table:formula="of:=IF([.A352]=0;0;(PPMT([.$C$3];[.A352];[.$C$4];-[.$C$2])))" office:value-type="float" office:value="0" calcext:value-type="float">
            <text:p>0.00</text:p>
          </table:table-cell>
          <table:table-cell table:style-name="ce373" table:formula="of:=IF([.A352]=0;0;(IPMT([.$C$3];[.A352];[.$C$4];-[.$C$2])))" office:value-type="float" office:value="0" calcext:value-type="float">
            <text:p>0.00</text:p>
          </table:table-cell>
          <table:table-cell table:style-name="ce373" table:formula="of:=IF([.A352]=0;0;(PMT([.$C$3];[.$C$4];-[.$C$2])))" office:value-type="float" office:value="0" calcext:value-type="float">
            <text:p>0.00</text:p>
          </table:table-cell>
          <table:table-cell table:style-name="ce373" table:formula="of:=IF([.A352]=0;0;([.$C$2]-[.F352]))" office:value-type="float" office:value="0" calcext:value-type="float">
            <text:p>0.00</text:p>
          </table:table-cell>
          <table:table-cell table:style-name="ce373" table:formula="of:=IF([.A352]=0;0;([.B352]+[.F35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2]&gt;=[.$C$4];0;IF([.A352]=0;0;(1+[.A352])))" office:value-type="float" office:value="0" calcext:value-type="float">
            <text:p>0</text:p>
          </table:table-cell>
          <table:table-cell table:style-name="ce373" table:formula="of:=IF([.A353]=0;0;(PPMT([.$C$3];[.A353];[.$C$4];-[.$C$2])))" office:value-type="float" office:value="0" calcext:value-type="float">
            <text:p>0.00</text:p>
          </table:table-cell>
          <table:table-cell table:style-name="ce373" table:formula="of:=IF([.A353]=0;0;(IPMT([.$C$3];[.A353];[.$C$4];-[.$C$2])))" office:value-type="float" office:value="0" calcext:value-type="float">
            <text:p>0.00</text:p>
          </table:table-cell>
          <table:table-cell table:style-name="ce373" table:formula="of:=IF([.A353]=0;0;(PMT([.$C$3];[.$C$4];-[.$C$2])))" office:value-type="float" office:value="0" calcext:value-type="float">
            <text:p>0.00</text:p>
          </table:table-cell>
          <table:table-cell table:style-name="ce373" table:formula="of:=IF([.A353]=0;0;([.$C$2]-[.F353]))" office:value-type="float" office:value="0" calcext:value-type="float">
            <text:p>0.00</text:p>
          </table:table-cell>
          <table:table-cell table:style-name="ce373" table:formula="of:=IF([.A353]=0;0;([.B353]+[.F35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3]&gt;=[.$C$4];0;IF([.A353]=0;0;(1+[.A353])))" office:value-type="float" office:value="0" calcext:value-type="float">
            <text:p>0</text:p>
          </table:table-cell>
          <table:table-cell table:style-name="ce373" table:formula="of:=IF([.A354]=0;0;(PPMT([.$C$3];[.A354];[.$C$4];-[.$C$2])))" office:value-type="float" office:value="0" calcext:value-type="float">
            <text:p>0.00</text:p>
          </table:table-cell>
          <table:table-cell table:style-name="ce373" table:formula="of:=IF([.A354]=0;0;(IPMT([.$C$3];[.A354];[.$C$4];-[.$C$2])))" office:value-type="float" office:value="0" calcext:value-type="float">
            <text:p>0.00</text:p>
          </table:table-cell>
          <table:table-cell table:style-name="ce373" table:formula="of:=IF([.A354]=0;0;(PMT([.$C$3];[.$C$4];-[.$C$2])))" office:value-type="float" office:value="0" calcext:value-type="float">
            <text:p>0.00</text:p>
          </table:table-cell>
          <table:table-cell table:style-name="ce373" table:formula="of:=IF([.A354]=0;0;([.$C$2]-[.F354]))" office:value-type="float" office:value="0" calcext:value-type="float">
            <text:p>0.00</text:p>
          </table:table-cell>
          <table:table-cell table:style-name="ce373" table:formula="of:=IF([.A354]=0;0;([.B354]+[.F35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4]&gt;=[.$C$4];0;IF([.A354]=0;0;(1+[.A354])))" office:value-type="float" office:value="0" calcext:value-type="float">
            <text:p>0</text:p>
          </table:table-cell>
          <table:table-cell table:style-name="ce373" table:formula="of:=IF([.A355]=0;0;(PPMT([.$C$3];[.A355];[.$C$4];-[.$C$2])))" office:value-type="float" office:value="0" calcext:value-type="float">
            <text:p>0.00</text:p>
          </table:table-cell>
          <table:table-cell table:style-name="ce373" table:formula="of:=IF([.A355]=0;0;(IPMT([.$C$3];[.A355];[.$C$4];-[.$C$2])))" office:value-type="float" office:value="0" calcext:value-type="float">
            <text:p>0.00</text:p>
          </table:table-cell>
          <table:table-cell table:style-name="ce373" table:formula="of:=IF([.A355]=0;0;(PMT([.$C$3];[.$C$4];-[.$C$2])))" office:value-type="float" office:value="0" calcext:value-type="float">
            <text:p>0.00</text:p>
          </table:table-cell>
          <table:table-cell table:style-name="ce373" table:formula="of:=IF([.A355]=0;0;([.$C$2]-[.F355]))" office:value-type="float" office:value="0" calcext:value-type="float">
            <text:p>0.00</text:p>
          </table:table-cell>
          <table:table-cell table:style-name="ce373" table:formula="of:=IF([.A355]=0;0;([.B355]+[.F35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5]&gt;=[.$C$4];0;IF([.A355]=0;0;(1+[.A355])))" office:value-type="float" office:value="0" calcext:value-type="float">
            <text:p>0</text:p>
          </table:table-cell>
          <table:table-cell table:style-name="ce373" table:formula="of:=IF([.A356]=0;0;(PPMT([.$C$3];[.A356];[.$C$4];-[.$C$2])))" office:value-type="float" office:value="0" calcext:value-type="float">
            <text:p>0.00</text:p>
          </table:table-cell>
          <table:table-cell table:style-name="ce373" table:formula="of:=IF([.A356]=0;0;(IPMT([.$C$3];[.A356];[.$C$4];-[.$C$2])))" office:value-type="float" office:value="0" calcext:value-type="float">
            <text:p>0.00</text:p>
          </table:table-cell>
          <table:table-cell table:style-name="ce373" table:formula="of:=IF([.A356]=0;0;(PMT([.$C$3];[.$C$4];-[.$C$2])))" office:value-type="float" office:value="0" calcext:value-type="float">
            <text:p>0.00</text:p>
          </table:table-cell>
          <table:table-cell table:style-name="ce373" table:formula="of:=IF([.A356]=0;0;([.$C$2]-[.F356]))" office:value-type="float" office:value="0" calcext:value-type="float">
            <text:p>0.00</text:p>
          </table:table-cell>
          <table:table-cell table:style-name="ce373" table:formula="of:=IF([.A356]=0;0;([.B356]+[.F35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6]&gt;=[.$C$4];0;IF([.A356]=0;0;(1+[.A356])))" office:value-type="float" office:value="0" calcext:value-type="float">
            <text:p>0</text:p>
          </table:table-cell>
          <table:table-cell table:style-name="ce373" table:formula="of:=IF([.A357]=0;0;(PPMT([.$C$3];[.A357];[.$C$4];-[.$C$2])))" office:value-type="float" office:value="0" calcext:value-type="float">
            <text:p>0.00</text:p>
          </table:table-cell>
          <table:table-cell table:style-name="ce373" table:formula="of:=IF([.A357]=0;0;(IPMT([.$C$3];[.A357];[.$C$4];-[.$C$2])))" office:value-type="float" office:value="0" calcext:value-type="float">
            <text:p>0.00</text:p>
          </table:table-cell>
          <table:table-cell table:style-name="ce373" table:formula="of:=IF([.A357]=0;0;(PMT([.$C$3];[.$C$4];-[.$C$2])))" office:value-type="float" office:value="0" calcext:value-type="float">
            <text:p>0.00</text:p>
          </table:table-cell>
          <table:table-cell table:style-name="ce373" table:formula="of:=IF([.A357]=0;0;([.$C$2]-[.F357]))" office:value-type="float" office:value="0" calcext:value-type="float">
            <text:p>0.00</text:p>
          </table:table-cell>
          <table:table-cell table:style-name="ce373" table:formula="of:=IF([.A357]=0;0;([.B357]+[.F35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7]&gt;=[.$C$4];0;IF([.A357]=0;0;(1+[.A357])))" office:value-type="float" office:value="0" calcext:value-type="float">
            <text:p>0</text:p>
          </table:table-cell>
          <table:table-cell table:style-name="ce373" table:formula="of:=IF([.A358]=0;0;(PPMT([.$C$3];[.A358];[.$C$4];-[.$C$2])))" office:value-type="float" office:value="0" calcext:value-type="float">
            <text:p>0.00</text:p>
          </table:table-cell>
          <table:table-cell table:style-name="ce373" table:formula="of:=IF([.A358]=0;0;(IPMT([.$C$3];[.A358];[.$C$4];-[.$C$2])))" office:value-type="float" office:value="0" calcext:value-type="float">
            <text:p>0.00</text:p>
          </table:table-cell>
          <table:table-cell table:style-name="ce373" table:formula="of:=IF([.A358]=0;0;(PMT([.$C$3];[.$C$4];-[.$C$2])))" office:value-type="float" office:value="0" calcext:value-type="float">
            <text:p>0.00</text:p>
          </table:table-cell>
          <table:table-cell table:style-name="ce373" table:formula="of:=IF([.A358]=0;0;([.$C$2]-[.F358]))" office:value-type="float" office:value="0" calcext:value-type="float">
            <text:p>0.00</text:p>
          </table:table-cell>
          <table:table-cell table:style-name="ce373" table:formula="of:=IF([.A358]=0;0;([.B358]+[.F35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8]&gt;=[.$C$4];0;IF([.A358]=0;0;(1+[.A358])))" office:value-type="float" office:value="0" calcext:value-type="float">
            <text:p>0</text:p>
          </table:table-cell>
          <table:table-cell table:style-name="ce373" table:formula="of:=IF([.A359]=0;0;(PPMT([.$C$3];[.A359];[.$C$4];-[.$C$2])))" office:value-type="float" office:value="0" calcext:value-type="float">
            <text:p>0.00</text:p>
          </table:table-cell>
          <table:table-cell table:style-name="ce373" table:formula="of:=IF([.A359]=0;0;(IPMT([.$C$3];[.A359];[.$C$4];-[.$C$2])))" office:value-type="float" office:value="0" calcext:value-type="float">
            <text:p>0.00</text:p>
          </table:table-cell>
          <table:table-cell table:style-name="ce373" table:formula="of:=IF([.A359]=0;0;(PMT([.$C$3];[.$C$4];-[.$C$2])))" office:value-type="float" office:value="0" calcext:value-type="float">
            <text:p>0.00</text:p>
          </table:table-cell>
          <table:table-cell table:style-name="ce373" table:formula="of:=IF([.A359]=0;0;([.$C$2]-[.F359]))" office:value-type="float" office:value="0" calcext:value-type="float">
            <text:p>0.00</text:p>
          </table:table-cell>
          <table:table-cell table:style-name="ce373" table:formula="of:=IF([.A359]=0;0;([.B359]+[.F35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59]&gt;=[.$C$4];0;IF([.A359]=0;0;(1+[.A359])))" office:value-type="float" office:value="0" calcext:value-type="float">
            <text:p>0</text:p>
          </table:table-cell>
          <table:table-cell table:style-name="ce373" table:formula="of:=IF([.A360]=0;0;(PPMT([.$C$3];[.A360];[.$C$4];-[.$C$2])))" office:value-type="float" office:value="0" calcext:value-type="float">
            <text:p>0.00</text:p>
          </table:table-cell>
          <table:table-cell table:style-name="ce373" table:formula="of:=IF([.A360]=0;0;(IPMT([.$C$3];[.A360];[.$C$4];-[.$C$2])))" office:value-type="float" office:value="0" calcext:value-type="float">
            <text:p>0.00</text:p>
          </table:table-cell>
          <table:table-cell table:style-name="ce373" table:formula="of:=IF([.A360]=0;0;(PMT([.$C$3];[.$C$4];-[.$C$2])))" office:value-type="float" office:value="0" calcext:value-type="float">
            <text:p>0.00</text:p>
          </table:table-cell>
          <table:table-cell table:style-name="ce373" table:formula="of:=IF([.A360]=0;0;([.$C$2]-[.F360]))" office:value-type="float" office:value="0" calcext:value-type="float">
            <text:p>0.00</text:p>
          </table:table-cell>
          <table:table-cell table:style-name="ce373" table:formula="of:=IF([.A360]=0;0;([.B360]+[.F35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0]&gt;=[.$C$4];0;IF([.A360]=0;0;(1+[.A360])))" office:value-type="float" office:value="0" calcext:value-type="float">
            <text:p>0</text:p>
          </table:table-cell>
          <table:table-cell table:style-name="ce373" table:formula="of:=IF([.A361]=0;0;(PPMT([.$C$3];[.A361];[.$C$4];-[.$C$2])))" office:value-type="float" office:value="0" calcext:value-type="float">
            <text:p>0.00</text:p>
          </table:table-cell>
          <table:table-cell table:style-name="ce373" table:formula="of:=IF([.A361]=0;0;(IPMT([.$C$3];[.A361];[.$C$4];-[.$C$2])))" office:value-type="float" office:value="0" calcext:value-type="float">
            <text:p>0.00</text:p>
          </table:table-cell>
          <table:table-cell table:style-name="ce373" table:formula="of:=IF([.A361]=0;0;(PMT([.$C$3];[.$C$4];-[.$C$2])))" office:value-type="float" office:value="0" calcext:value-type="float">
            <text:p>0.00</text:p>
          </table:table-cell>
          <table:table-cell table:style-name="ce373" table:formula="of:=IF([.A361]=0;0;([.$C$2]-[.F361]))" office:value-type="float" office:value="0" calcext:value-type="float">
            <text:p>0.00</text:p>
          </table:table-cell>
          <table:table-cell table:style-name="ce373" table:formula="of:=IF([.A361]=0;0;([.B361]+[.F36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1]&gt;=[.$C$4];0;IF([.A361]=0;0;(1+[.A361])))" office:value-type="float" office:value="0" calcext:value-type="float">
            <text:p>0</text:p>
          </table:table-cell>
          <table:table-cell table:style-name="ce373" table:formula="of:=IF([.A362]=0;0;(PPMT([.$C$3];[.A362];[.$C$4];-[.$C$2])))" office:value-type="float" office:value="0" calcext:value-type="float">
            <text:p>0.00</text:p>
          </table:table-cell>
          <table:table-cell table:style-name="ce373" table:formula="of:=IF([.A362]=0;0;(IPMT([.$C$3];[.A362];[.$C$4];-[.$C$2])))" office:value-type="float" office:value="0" calcext:value-type="float">
            <text:p>0.00</text:p>
          </table:table-cell>
          <table:table-cell table:style-name="ce373" table:formula="of:=IF([.A362]=0;0;(PMT([.$C$3];[.$C$4];-[.$C$2])))" office:value-type="float" office:value="0" calcext:value-type="float">
            <text:p>0.00</text:p>
          </table:table-cell>
          <table:table-cell table:style-name="ce373" table:formula="of:=IF([.A362]=0;0;([.$C$2]-[.F362]))" office:value-type="float" office:value="0" calcext:value-type="float">
            <text:p>0.00</text:p>
          </table:table-cell>
          <table:table-cell table:style-name="ce373" table:formula="of:=IF([.A362]=0;0;([.B362]+[.F361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2]&gt;=[.$C$4];0;IF([.A362]=0;0;(1+[.A362])))" office:value-type="float" office:value="0" calcext:value-type="float">
            <text:p>0</text:p>
          </table:table-cell>
          <table:table-cell table:style-name="ce373" table:formula="of:=IF([.A363]=0;0;(PPMT([.$C$3];[.A363];[.$C$4];-[.$C$2])))" office:value-type="float" office:value="0" calcext:value-type="float">
            <text:p>0.00</text:p>
          </table:table-cell>
          <table:table-cell table:style-name="ce373" table:formula="of:=IF([.A363]=0;0;(IPMT([.$C$3];[.A363];[.$C$4];-[.$C$2])))" office:value-type="float" office:value="0" calcext:value-type="float">
            <text:p>0.00</text:p>
          </table:table-cell>
          <table:table-cell table:style-name="ce373" table:formula="of:=IF([.A363]=0;0;(PMT([.$C$3];[.$C$4];-[.$C$2])))" office:value-type="float" office:value="0" calcext:value-type="float">
            <text:p>0.00</text:p>
          </table:table-cell>
          <table:table-cell table:style-name="ce373" table:formula="of:=IF([.A363]=0;0;([.$C$2]-[.F363]))" office:value-type="float" office:value="0" calcext:value-type="float">
            <text:p>0.00</text:p>
          </table:table-cell>
          <table:table-cell table:style-name="ce373" table:formula="of:=IF([.A363]=0;0;([.B363]+[.F362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3]&gt;=[.$C$4];0;IF([.A363]=0;0;(1+[.A363])))" office:value-type="float" office:value="0" calcext:value-type="float">
            <text:p>0</text:p>
          </table:table-cell>
          <table:table-cell table:style-name="ce373" table:formula="of:=IF([.A364]=0;0;(PPMT([.$C$3];[.A364];[.$C$4];-[.$C$2])))" office:value-type="float" office:value="0" calcext:value-type="float">
            <text:p>0.00</text:p>
          </table:table-cell>
          <table:table-cell table:style-name="ce373" table:formula="of:=IF([.A364]=0;0;(IPMT([.$C$3];[.A364];[.$C$4];-[.$C$2])))" office:value-type="float" office:value="0" calcext:value-type="float">
            <text:p>0.00</text:p>
          </table:table-cell>
          <table:table-cell table:style-name="ce373" table:formula="of:=IF([.A364]=0;0;(PMT([.$C$3];[.$C$4];-[.$C$2])))" office:value-type="float" office:value="0" calcext:value-type="float">
            <text:p>0.00</text:p>
          </table:table-cell>
          <table:table-cell table:style-name="ce373" table:formula="of:=IF([.A364]=0;0;([.$C$2]-[.F364]))" office:value-type="float" office:value="0" calcext:value-type="float">
            <text:p>0.00</text:p>
          </table:table-cell>
          <table:table-cell table:style-name="ce373" table:formula="of:=IF([.A364]=0;0;([.B364]+[.F363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4]&gt;=[.$C$4];0;IF([.A364]=0;0;(1+[.A364])))" office:value-type="float" office:value="0" calcext:value-type="float">
            <text:p>0</text:p>
          </table:table-cell>
          <table:table-cell table:style-name="ce373" table:formula="of:=IF([.A365]=0;0;(PPMT([.$C$3];[.A365];[.$C$4];-[.$C$2])))" office:value-type="float" office:value="0" calcext:value-type="float">
            <text:p>0.00</text:p>
          </table:table-cell>
          <table:table-cell table:style-name="ce373" table:formula="of:=IF([.A365]=0;0;(IPMT([.$C$3];[.A365];[.$C$4];-[.$C$2])))" office:value-type="float" office:value="0" calcext:value-type="float">
            <text:p>0.00</text:p>
          </table:table-cell>
          <table:table-cell table:style-name="ce373" table:formula="of:=IF([.A365]=0;0;(PMT([.$C$3];[.$C$4];-[.$C$2])))" office:value-type="float" office:value="0" calcext:value-type="float">
            <text:p>0.00</text:p>
          </table:table-cell>
          <table:table-cell table:style-name="ce373" table:formula="of:=IF([.A365]=0;0;([.$C$2]-[.F365]))" office:value-type="float" office:value="0" calcext:value-type="float">
            <text:p>0.00</text:p>
          </table:table-cell>
          <table:table-cell table:style-name="ce373" table:formula="of:=IF([.A365]=0;0;([.B365]+[.F364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5]&gt;=[.$C$4];0;IF([.A365]=0;0;(1+[.A365])))" office:value-type="float" office:value="0" calcext:value-type="float">
            <text:p>0</text:p>
          </table:table-cell>
          <table:table-cell table:style-name="ce373" table:formula="of:=IF([.A366]=0;0;(PPMT([.$C$3];[.A366];[.$C$4];-[.$C$2])))" office:value-type="float" office:value="0" calcext:value-type="float">
            <text:p>0.00</text:p>
          </table:table-cell>
          <table:table-cell table:style-name="ce373" table:formula="of:=IF([.A366]=0;0;(IPMT([.$C$3];[.A366];[.$C$4];-[.$C$2])))" office:value-type="float" office:value="0" calcext:value-type="float">
            <text:p>0.00</text:p>
          </table:table-cell>
          <table:table-cell table:style-name="ce373" table:formula="of:=IF([.A366]=0;0;(PMT([.$C$3];[.$C$4];-[.$C$2])))" office:value-type="float" office:value="0" calcext:value-type="float">
            <text:p>0.00</text:p>
          </table:table-cell>
          <table:table-cell table:style-name="ce373" table:formula="of:=IF([.A366]=0;0;([.$C$2]-[.F366]))" office:value-type="float" office:value="0" calcext:value-type="float">
            <text:p>0.00</text:p>
          </table:table-cell>
          <table:table-cell table:style-name="ce373" table:formula="of:=IF([.A366]=0;0;([.B366]+[.F365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6]&gt;=[.$C$4];0;IF([.A366]=0;0;(1+[.A366])))" office:value-type="float" office:value="0" calcext:value-type="float">
            <text:p>0</text:p>
          </table:table-cell>
          <table:table-cell table:style-name="ce373" table:formula="of:=IF([.A367]=0;0;(PPMT([.$C$3];[.A367];[.$C$4];-[.$C$2])))" office:value-type="float" office:value="0" calcext:value-type="float">
            <text:p>0.00</text:p>
          </table:table-cell>
          <table:table-cell table:style-name="ce373" table:formula="of:=IF([.A367]=0;0;(IPMT([.$C$3];[.A367];[.$C$4];-[.$C$2])))" office:value-type="float" office:value="0" calcext:value-type="float">
            <text:p>0.00</text:p>
          </table:table-cell>
          <table:table-cell table:style-name="ce373" table:formula="of:=IF([.A367]=0;0;(PMT([.$C$3];[.$C$4];-[.$C$2])))" office:value-type="float" office:value="0" calcext:value-type="float">
            <text:p>0.00</text:p>
          </table:table-cell>
          <table:table-cell table:style-name="ce373" table:formula="of:=IF([.A367]=0;0;([.$C$2]-[.F367]))" office:value-type="float" office:value="0" calcext:value-type="float">
            <text:p>0.00</text:p>
          </table:table-cell>
          <table:table-cell table:style-name="ce373" table:formula="of:=IF([.A367]=0;0;([.B367]+[.F366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7]&gt;=[.$C$4];0;IF([.A367]=0;0;(1+[.A367])))" office:value-type="float" office:value="0" calcext:value-type="float">
            <text:p>0</text:p>
          </table:table-cell>
          <table:table-cell table:style-name="ce373" table:formula="of:=IF([.A368]=0;0;(PPMT([.$C$3];[.A368];[.$C$4];-[.$C$2])))" office:value-type="float" office:value="0" calcext:value-type="float">
            <text:p>0.00</text:p>
          </table:table-cell>
          <table:table-cell table:style-name="ce373" table:formula="of:=IF([.A368]=0;0;(IPMT([.$C$3];[.A368];[.$C$4];-[.$C$2])))" office:value-type="float" office:value="0" calcext:value-type="float">
            <text:p>0.00</text:p>
          </table:table-cell>
          <table:table-cell table:style-name="ce373" table:formula="of:=IF([.A368]=0;0;(PMT([.$C$3];[.$C$4];-[.$C$2])))" office:value-type="float" office:value="0" calcext:value-type="float">
            <text:p>0.00</text:p>
          </table:table-cell>
          <table:table-cell table:style-name="ce373" table:formula="of:=IF([.A368]=0;0;([.$C$2]-[.F368]))" office:value-type="float" office:value="0" calcext:value-type="float">
            <text:p>0.00</text:p>
          </table:table-cell>
          <table:table-cell table:style-name="ce373" table:formula="of:=IF([.A368]=0;0;([.B368]+[.F367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8]&gt;=[.$C$4];0;IF([.A368]=0;0;(1+[.A368])))" office:value-type="float" office:value="0" calcext:value-type="float">
            <text:p>0</text:p>
          </table:table-cell>
          <table:table-cell table:style-name="ce373" table:formula="of:=IF([.A369]=0;0;(PPMT([.$C$3];[.A369];[.$C$4];-[.$C$2])))" office:value-type="float" office:value="0" calcext:value-type="float">
            <text:p>0.00</text:p>
          </table:table-cell>
          <table:table-cell table:style-name="ce373" table:formula="of:=IF([.A369]=0;0;(IPMT([.$C$3];[.A369];[.$C$4];-[.$C$2])))" office:value-type="float" office:value="0" calcext:value-type="float">
            <text:p>0.00</text:p>
          </table:table-cell>
          <table:table-cell table:style-name="ce373" table:formula="of:=IF([.A369]=0;0;(PMT([.$C$3];[.$C$4];-[.$C$2])))" office:value-type="float" office:value="0" calcext:value-type="float">
            <text:p>0.00</text:p>
          </table:table-cell>
          <table:table-cell table:style-name="ce373" table:formula="of:=IF([.A369]=0;0;([.$C$2]-[.F369]))" office:value-type="float" office:value="0" calcext:value-type="float">
            <text:p>0.00</text:p>
          </table:table-cell>
          <table:table-cell table:style-name="ce373" table:formula="of:=IF([.A369]=0;0;([.B369]+[.F368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69]&gt;=[.$C$4];0;IF([.A369]=0;0;(1+[.A369])))" office:value-type="float" office:value="0" calcext:value-type="float">
            <text:p>0</text:p>
          </table:table-cell>
          <table:table-cell table:style-name="ce373" table:formula="of:=IF([.A370]=0;0;(PPMT([.$C$3];[.A370];[.$C$4];-[.$C$2])))" office:value-type="float" office:value="0" calcext:value-type="float">
            <text:p>0.00</text:p>
          </table:table-cell>
          <table:table-cell table:style-name="ce373" table:formula="of:=IF([.A370]=0;0;(IPMT([.$C$3];[.A370];[.$C$4];-[.$C$2])))" office:value-type="float" office:value="0" calcext:value-type="float">
            <text:p>0.00</text:p>
          </table:table-cell>
          <table:table-cell table:style-name="ce373" table:formula="of:=IF([.A370]=0;0;(PMT([.$C$3];[.$C$4];-[.$C$2])))" office:value-type="float" office:value="0" calcext:value-type="float">
            <text:p>0.00</text:p>
          </table:table-cell>
          <table:table-cell table:style-name="ce373" table:formula="of:=IF([.A370]=0;0;([.$C$2]-[.F370]))" office:value-type="float" office:value="0" calcext:value-type="float">
            <text:p>0.00</text:p>
          </table:table-cell>
          <table:table-cell table:style-name="ce373" table:formula="of:=IF([.A370]=0;0;([.B370]+[.F369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367" table:formula="of:=IF([.A370]&gt;=[.$C$4];0;IF([.A370]=0;0;(1+[.A370])))" office:value-type="float" office:value="0" calcext:value-type="float">
            <text:p>0</text:p>
          </table:table-cell>
          <table:table-cell table:style-name="ce373" table:formula="of:=IF([.A371]=0;0;(PPMT([.$C$3];[.A371];[.$C$4];-[.$C$2])))" office:value-type="float" office:value="0" calcext:value-type="float">
            <text:p>0.00</text:p>
          </table:table-cell>
          <table:table-cell table:style-name="ce373" table:formula="of:=IF([.A371]=0;0;(IPMT([.$C$3];[.A371];[.$C$4];-[.$C$2])))" office:value-type="float" office:value="0" calcext:value-type="float">
            <text:p>0.00</text:p>
          </table:table-cell>
          <table:table-cell table:style-name="ce373" table:formula="of:=IF([.A371]=0;0;(PMT([.$C$3];[.$C$4];-[.$C$2])))" office:value-type="float" office:value="0" calcext:value-type="float">
            <text:p>0.00</text:p>
          </table:table-cell>
          <table:table-cell table:style-name="ce373" table:formula="of:=IF([.A371]=0;0;([.$C$2]-[.F371]))" office:value-type="float" office:value="0" calcext:value-type="float">
            <text:p>0.00</text:p>
          </table:table-cell>
          <table:table-cell table:style-name="ce373" table:formula="of:=IF([.A371]=0;0;([.B371]+[.F370]))" office:value-type="float" office:value="0" calcext:value-type="float">
            <text:p>0.00</text:p>
          </table:table-cell>
          <table:table-cell table:number-columns-repeated="16378"/>
        </table:table-row>
        <table:table-row table:style-name="ro1" table:visibility="collapse" table:number-rows-repeated="1048204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'PLAN DE PAGOS'.A11:'PLAN DE PAGOS'.F22">
            <calcext:condition calcext:apply-style-name="ConditionalStyle_16" calcext:value="!=0" calcext:base-cell-address="'PLAN DE PAGOS'.A11"/>
          </calcext:conditional-format>
          <calcext:conditional-format calcext:target-range-address="'PLAN DE PAGOS'.A23:'PLAN DE PAGOS'.F371">
            <calcext:condition calcext:apply-style-name="ConditionalStyle_17" calcext:value="!=0" calcext:base-cell-address="'PLAN DE PAGOS'.A23"/>
          </calcext:conditional-format>
        </calcext:conditional-formats>
      </table:table>
      <table:table table:name="TABLA AMORTIZACIÓN" table:style-name="ta18">
        <table:table-column table:style-name="co61" table:default-cell-style-name="ce382"/>
        <table:table-column table:style-name="co64" table:default-cell-style-name="ce382"/>
        <table:table-column table:style-name="co10" table:default-cell-style-name="ce382"/>
        <table:table-column table:style-name="co65" table:default-cell-style-name="ce382"/>
        <table:table-column table:style-name="co66" table:default-cell-style-name="ce382"/>
        <table:table-column table:style-name="co2" table:default-cell-style-name="ce382"/>
        <table:table-column table:style-name="co67" table:default-cell-style-name="ce382"/>
        <table:table-column table:style-name="co61" table:number-columns-repeated="16377" table:default-cell-style-name="ce382"/>
        <table:table-row table:style-name="ro20">
          <table:table-cell>
            <draw:custom-shape draw:z-index="0" draw:name="Rectángulo 5" draw:style-name="gr6" draw:text-style-name="P6" svg:width="17.038cm" svg:height="2.027cm" svg:x="0.476cm" svg:y="0.185cm">
              <text:p text:style-name="P5"><text:span text:style-name="T3">Simulador Créditos</text:span></text:p>
              <text:p text:style-name="P5"><text:span text:style-name="T4">www.excelparatodos.c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20" table:number-rows-repeated="5">
          <table:table-cell table:number-columns-repeated="16384"/>
        </table:table-row>
        <table:table-row table:style-name="ro20">
          <table:table-cell table:number-columns-repeated="2"/>
          <table:table-cell table:style-name="ce387" office:value-type="string" calcext:value-type="string">
            <text:p>PRESTAMO</text:p>
          </table:table-cell>
          <table:table-cell table:style-name="ce395" office:value-type="float" office:value="2344.44" calcext:value-type="float">
            <text:p>$ 2,344.44</text:p>
          </table:table-cell>
          <table:table-cell table:number-columns-repeated="16380"/>
        </table:table-row>
        <table:table-row table:style-name="ro20">
          <table:table-cell table:number-columns-repeated="2"/>
          <table:table-cell table:style-name="ce388" office:value-type="string" calcext:value-type="string">
            <text:p>Residual</text:p>
          </table:table-cell>
          <table:table-cell table:style-name="ce396" office:value-type="float" office:value="0" calcext:value-type="float">
            <text:p>$ 0.00</text:p>
          </table:table-cell>
          <table:table-cell table:style-name="ce401"/>
          <table:table-cell table:number-columns-repeated="16379"/>
        </table:table-row>
        <table:table-row table:style-name="ro20">
          <table:table-cell table:number-columns-repeated="2"/>
          <table:table-cell table:style-name="ce388" office:value-type="string" calcext:value-type="string">
            <text:p>N° Pagos</text:p>
          </table:table-cell>
          <table:table-cell table:style-name="ce397" office:value-type="float" office:value="12" calcext:value-type="float">
            <text:p>12</text:p>
          </table:table-cell>
          <table:table-cell table:number-columns-repeated="16380"/>
        </table:table-row>
        <table:table-row table:style-name="ro20">
          <table:table-cell table:number-columns-repeated="2"/>
          <table:table-cell table:style-name="ce388" office:value-type="string" calcext:value-type="string">
            <text:p>Interes E.A.</text:p>
          </table:table-cell>
          <table:table-cell table:style-name="ce398" office:value-type="percentage" office:value="0.18" calcext:value-type="percentage">
            <text:p>18.000%</text:p>
          </table:table-cell>
          <table:table-cell table:number-columns-repeated="16380"/>
        </table:table-row>
        <table:table-row table:style-name="ro20">
          <table:table-cell table:number-columns-repeated="2"/>
          <table:table-cell table:style-name="ce389" office:value-type="string" calcext:value-type="string">
            <text:p>Interes E.M.</text:p>
          </table:table-cell>
          <table:table-cell table:style-name="ce399" office:value-type="percentage" office:value="0.015" calcext:value-type="percentage">
            <text:p>1.500%</text:p>
          </table:table-cell>
          <table:table-cell table:number-columns-repeated="16380"/>
        </table:table-row>
        <table:table-row table:style-name="ro21">
          <table:table-cell table:number-columns-repeated="2"/>
          <table:table-cell table:style-name="ce390" office:value-type="string" calcext:value-type="string">
            <text:p>Cuota</text:p>
          </table:table-cell>
          <table:table-cell table:style-name="ce400" table:formula="of:=+PMT([.D11];[.D9];-[.D7];[.D8])" office:value-type="float" office:value="214.938242569079" calcext:value-type="float">
            <text:p>$ 215</text:p>
          </table:table-cell>
          <table:table-cell table:style-name="ce401" office:value-type="string" calcext:value-type="string">
            <text:p>* Valor a pagar Cada mes</text:p>
          </table:table-cell>
          <table:table-cell/>
          <table:table-cell table:style-name="ce406" table:formula="of:=+IRR([$'TABLA AMORTIZACIÓN'.$G$15:.$G$235])" office:value-type="percentage" office:value="0.015" calcext:value-type="percentage">
            <text:p>TIR = 1.500%</text:p>
          </table:table-cell>
          <table:table-cell table:number-columns-repeated="16377"/>
        </table:table-row>
        <table:table-row table:style-name="ro22">
          <table:table-cell table:number-columns-repeated="4"/>
          <table:table-cell table:style-name="ce402" table:formula="of:=1-[.F13]" office:value-type="percentage" office:value="0.0910412327521953" calcext:value-type="percentage">
            <text:p>9 %</text:p>
          </table:table-cell>
          <table:table-cell table:style-name="ce404" table:formula="of:=+[.F14]/([.E14]+[.F14])" office:value-type="percentage" office:value="0.908958767247805" calcext:value-type="percentage">
            <text:p>91 %</text:p>
          </table:table-cell>
          <table:table-cell table:number-columns-repeated="16378"/>
        </table:table-row>
        <table:table-row table:style-name="ro20">
          <table:table-cell table:number-columns-repeated="4"/>
          <table:table-cell table:style-name="ce403" table:formula="of:=+SUBTOTAL(9;[$'TABLA AMORTIZACIÓN'.$E$16:.$E$235])" office:value-type="float" office:value="234.818910828953" calcext:value-type="float">
            <text:p>$ 235</text:p>
          </table:table-cell>
          <table:table-cell table:style-name="ce405" table:formula="of:=+SUBTOTAL(9;[$'TABLA AMORTIZACIÓN'.$F$15:.$F$235])" office:value-type="float" office:value="2344.44" calcext:value-type="float">
            <text:p>$ 2,344</text:p>
          </table:table-cell>
          <table:table-cell table:number-columns-repeated="16378"/>
        </table:table-row>
        <table:table-row table:style-name="ro23">
          <table:table-cell/>
          <table:table-cell table:style-name="ce383" office:value-type="string" calcext:value-type="string">
            <text:p>Periodo</text:p>
          </table:table-cell>
          <table:table-cell table:style-name="ce391" office:value-type="string" calcext:value-type="string">
            <text:p>Saldo Deuda</text:p>
          </table:table-cell>
          <table:table-cell table:style-name="ce391" office:value-type="string" calcext:value-type="string">
            <text:p>Cuota</text:p>
          </table:table-cell>
          <table:table-cell table:style-name="ce391" office:value-type="string" calcext:value-type="string">
            <text:p>Interes</text:p>
          </table:table-cell>
          <table:table-cell table:style-name="ce391" office:value-type="string" calcext:value-type="string">
            <text:p>Amortización K</text:p>
          </table:table-cell>
          <table:table-cell table:style-name="ce407" office:value-type="string" calcext:value-type="string">
            <text:p>TIR</text:p>
          </table:table-cell>
          <table:table-cell table:number-columns-repeated="16377"/>
        </table:table-row>
        <table:table-row table:style-name="ro20">
          <table:table-cell/>
          <table:table-cell table:style-name="ce384" office:value-type="float" office:value="0" calcext:value-type="float">
            <text:p>0</text:p>
          </table:table-cell>
          <table:table-cell table:style-name="ce392" table:formula="of:=+IF([.B16]&lt;&gt;&quot;&quot;;VP;&quot;&quot;)" office:value-type="float" office:value="2344.44" calcext:value-type="float">
            <text:p>$ 2,344</text:p>
          </table:table-cell>
          <table:table-cell table:number-columns-repeated="3" table:style-name="ce392" office:value-type="float" office:value="0" calcext:value-type="float">
            <text:p>$ 0</text:p>
          </table:table-cell>
          <table:table-cell table:style-name="ce408" table:formula="of:=-[.C16]" office:value-type="float" office:value="-2344.44" calcext:value-type="float">
            <text:p>-$ 2,344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]+1)&gt;N;&quot;&quot;;([.B16]+1));&quot;&quot;)" office:value-type="float" office:value="1" calcext:value-type="float">
            <text:p>1</text:p>
          </table:table-cell>
          <table:table-cell table:style-name="ce393" table:formula="of:=+IF([.$B17]&lt;&gt;&quot;&quot;;[.C16]-[.F17];&quot;&quot;)" office:value-type="float" office:value="2164.66835743092" calcext:value-type="float">
            <text:p>$ 2,165</text:p>
          </table:table-cell>
          <table:table-cell table:style-name="ce393" table:formula="of:=+IF([.$B17]&lt;&gt;&quot;&quot;;A;&quot;&quot;)" office:value-type="float" office:value="214.938242569079" calcext:value-type="float">
            <text:p>$ 215</text:p>
          </table:table-cell>
          <table:table-cell table:style-name="ce393" table:formula="of:=+IF([.$B17]&lt;&gt;&quot;&quot;;[.C16]*[.$D$11];&quot;&quot;)" office:value-type="float" office:value="35.1666" calcext:value-type="float">
            <text:p>$ 35</text:p>
          </table:table-cell>
          <table:table-cell table:style-name="ce393" table:formula="of:=+IF([.$B17]&lt;&gt;&quot;&quot;;[.D17]-[.E17];&quot;&quot;)" office:value-type="float" office:value="179.771642569079" calcext:value-type="float">
            <text:p>$ 180</text:p>
          </table:table-cell>
          <table:table-cell table:style-name="ce409" table:formula="of:=+IF([.$C17]&lt;&gt;&quot;&quot;;[.D17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]+1)&gt;N;&quot;&quot;;([.B17]+1));&quot;&quot;)" office:value-type="float" office:value="2" calcext:value-type="float">
            <text:p>2</text:p>
          </table:table-cell>
          <table:table-cell table:style-name="ce393" table:formula="of:=+IF([.$B18]&lt;&gt;&quot;&quot;;[.C17]-[.F18];&quot;&quot;)" office:value-type="float" office:value="1982.20014022331" calcext:value-type="float">
            <text:p>$ 1,982</text:p>
          </table:table-cell>
          <table:table-cell table:style-name="ce393" table:formula="of:=+IF([.$B18]&lt;&gt;&quot;&quot;;A;&quot;&quot;)" office:value-type="float" office:value="214.938242569079" calcext:value-type="float">
            <text:p>$ 215</text:p>
          </table:table-cell>
          <table:table-cell table:style-name="ce393" table:formula="of:=+IF([.$B18]&lt;&gt;&quot;&quot;;[.C17]*[.$D$11];&quot;&quot;)" office:value-type="float" office:value="32.4700253614638" calcext:value-type="float">
            <text:p>$ 32</text:p>
          </table:table-cell>
          <table:table-cell table:style-name="ce393" table:formula="of:=+IF([.$B18]&lt;&gt;&quot;&quot;;[.D18]-[.E18];&quot;&quot;)" office:value-type="float" office:value="182.468217207616" calcext:value-type="float">
            <text:p>$ 182</text:p>
          </table:table-cell>
          <table:table-cell table:style-name="ce409" table:formula="of:=+IF([.$C18]&lt;&gt;&quot;&quot;;[.D18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]+1)&gt;N;&quot;&quot;;([.B18]+1));&quot;&quot;)" office:value-type="float" office:value="3" calcext:value-type="float">
            <text:p>3</text:p>
          </table:table-cell>
          <table:table-cell table:style-name="ce393" table:formula="of:=+IF([.$B19]&lt;&gt;&quot;&quot;;[.C18]-[.F19];&quot;&quot;)" office:value-type="float" office:value="1796.99489975758" calcext:value-type="float">
            <text:p>$ 1,797</text:p>
          </table:table-cell>
          <table:table-cell table:style-name="ce393" table:formula="of:=+IF([.$B19]&lt;&gt;&quot;&quot;;A;&quot;&quot;)" office:value-type="float" office:value="214.938242569079" calcext:value-type="float">
            <text:p>$ 215</text:p>
          </table:table-cell>
          <table:table-cell table:style-name="ce393" table:formula="of:=+IF([.$B19]&lt;&gt;&quot;&quot;;[.C18]*[.$D$11];&quot;&quot;)" office:value-type="float" office:value="29.7330021033496" calcext:value-type="float">
            <text:p>$ 30</text:p>
          </table:table-cell>
          <table:table-cell table:style-name="ce393" table:formula="of:=+IF([.$B19]&lt;&gt;&quot;&quot;;[.D19]-[.E19];&quot;&quot;)" office:value-type="float" office:value="185.20524046573" calcext:value-type="float">
            <text:p>$ 185</text:p>
          </table:table-cell>
          <table:table-cell table:style-name="ce409" table:formula="of:=+IF([.$C19]&lt;&gt;&quot;&quot;;[.D19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]+1)&gt;N;&quot;&quot;;([.B19]+1));&quot;&quot;)" office:value-type="float" office:value="4" calcext:value-type="float">
            <text:p>4</text:p>
          </table:table-cell>
          <table:table-cell table:style-name="ce393" table:formula="of:=+IF([.$B20]&lt;&gt;&quot;&quot;;[.C19]-[.F20];&quot;&quot;)" office:value-type="float" office:value="1609.01158068486" calcext:value-type="float">
            <text:p>$ 1,609</text:p>
          </table:table-cell>
          <table:table-cell table:style-name="ce393" table:formula="of:=+IF([.$B20]&lt;&gt;&quot;&quot;;A;&quot;&quot;)" office:value-type="float" office:value="214.938242569079" calcext:value-type="float">
            <text:p>$ 215</text:p>
          </table:table-cell>
          <table:table-cell table:style-name="ce393" table:formula="of:=+IF([.$B20]&lt;&gt;&quot;&quot;;[.C19]*[.$D$11];&quot;&quot;)" office:value-type="float" office:value="26.9549234963636" calcext:value-type="float">
            <text:p>$ 27</text:p>
          </table:table-cell>
          <table:table-cell table:style-name="ce393" table:formula="of:=+IF([.$B20]&lt;&gt;&quot;&quot;;[.D20]-[.E20];&quot;&quot;)" office:value-type="float" office:value="187.983319072716" calcext:value-type="float">
            <text:p>$ 188</text:p>
          </table:table-cell>
          <table:table-cell table:style-name="ce409" table:formula="of:=+IF([.$C20]&lt;&gt;&quot;&quot;;[.D20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]+1)&gt;N;&quot;&quot;;([.B20]+1));&quot;&quot;)" office:value-type="float" office:value="5" calcext:value-type="float">
            <text:p>5</text:p>
          </table:table-cell>
          <table:table-cell table:style-name="ce393" table:formula="of:=+IF([.$B21]&lt;&gt;&quot;&quot;;[.C20]-[.F21];&quot;&quot;)" office:value-type="float" office:value="1418.20851182605" calcext:value-type="float">
            <text:p>$ 1,418</text:p>
          </table:table-cell>
          <table:table-cell table:style-name="ce393" table:formula="of:=+IF([.$B21]&lt;&gt;&quot;&quot;;A;&quot;&quot;)" office:value-type="float" office:value="214.938242569079" calcext:value-type="float">
            <text:p>$ 215</text:p>
          </table:table-cell>
          <table:table-cell table:style-name="ce393" table:formula="of:=+IF([.$B21]&lt;&gt;&quot;&quot;;[.C20]*[.$D$11];&quot;&quot;)" office:value-type="float" office:value="24.1351737102729" calcext:value-type="float">
            <text:p>$ 24</text:p>
          </table:table-cell>
          <table:table-cell table:style-name="ce393" table:formula="of:=+IF([.$B21]&lt;&gt;&quot;&quot;;[.D21]-[.E21];&quot;&quot;)" office:value-type="float" office:value="190.803068858806" calcext:value-type="float">
            <text:p>$ 191</text:p>
          </table:table-cell>
          <table:table-cell table:style-name="ce409" table:formula="of:=+IF([.$C21]&lt;&gt;&quot;&quot;;[.D21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]+1)&gt;N;&quot;&quot;;([.B21]+1));&quot;&quot;)" office:value-type="float" office:value="6" calcext:value-type="float">
            <text:p>6</text:p>
          </table:table-cell>
          <table:table-cell table:style-name="ce393" table:formula="of:=+IF([.$B22]&lt;&gt;&quot;&quot;;[.C21]-[.F22];&quot;&quot;)" office:value-type="float" office:value="1224.54339693436" calcext:value-type="float">
            <text:p>$ 1,225</text:p>
          </table:table-cell>
          <table:table-cell table:style-name="ce393" table:formula="of:=+IF([.$B22]&lt;&gt;&quot;&quot;;A;&quot;&quot;)" office:value-type="float" office:value="214.938242569079" calcext:value-type="float">
            <text:p>$ 215</text:p>
          </table:table-cell>
          <table:table-cell table:style-name="ce393" table:formula="of:=+IF([.$B22]&lt;&gt;&quot;&quot;;[.C21]*[.$D$11];&quot;&quot;)" office:value-type="float" office:value="21.2731276773908" calcext:value-type="float">
            <text:p>$ 21</text:p>
          </table:table-cell>
          <table:table-cell table:style-name="ce393" table:formula="of:=+IF([.$B22]&lt;&gt;&quot;&quot;;[.D22]-[.E22];&quot;&quot;)" office:value-type="float" office:value="193.665114891689" calcext:value-type="float">
            <text:p>$ 194</text:p>
          </table:table-cell>
          <table:table-cell table:style-name="ce409" table:formula="of:=+IF([.$C22]&lt;&gt;&quot;&quot;;[.D22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]+1)&gt;N;&quot;&quot;;([.B22]+1));&quot;&quot;)" office:value-type="float" office:value="7" calcext:value-type="float">
            <text:p>7</text:p>
          </table:table-cell>
          <table:table-cell table:style-name="ce393" table:formula="of:=+IF([.$B23]&lt;&gt;&quot;&quot;;[.C22]-[.F23];&quot;&quot;)" office:value-type="float" office:value="1027.9733053193" calcext:value-type="float">
            <text:p>$ 1,028</text:p>
          </table:table-cell>
          <table:table-cell table:style-name="ce393" table:formula="of:=+IF([.$B23]&lt;&gt;&quot;&quot;;A;&quot;&quot;)" office:value-type="float" office:value="214.938242569079" calcext:value-type="float">
            <text:p>$ 215</text:p>
          </table:table-cell>
          <table:table-cell table:style-name="ce393" table:formula="of:=+IF([.$B23]&lt;&gt;&quot;&quot;;[.C22]*[.$D$11];&quot;&quot;)" office:value-type="float" office:value="18.3681509540155" calcext:value-type="float">
            <text:p>$ 18</text:p>
          </table:table-cell>
          <table:table-cell table:style-name="ce393" table:formula="of:=+IF([.$B23]&lt;&gt;&quot;&quot;;[.D23]-[.E23];&quot;&quot;)" office:value-type="float" office:value="196.570091615064" calcext:value-type="float">
            <text:p>$ 197</text:p>
          </table:table-cell>
          <table:table-cell table:style-name="ce409" table:formula="of:=+IF([.$C23]&lt;&gt;&quot;&quot;;[.D23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]+1)&gt;N;&quot;&quot;;([.B23]+1));&quot;&quot;)" office:value-type="float" office:value="8" calcext:value-type="float">
            <text:p>8</text:p>
          </table:table-cell>
          <table:table-cell table:style-name="ce393" table:formula="of:=+IF([.$B24]&lt;&gt;&quot;&quot;;[.C23]-[.F24];&quot;&quot;)" office:value-type="float" office:value="828.454662330011" calcext:value-type="float">
            <text:p>$ 828</text:p>
          </table:table-cell>
          <table:table-cell table:style-name="ce393" table:formula="of:=+IF([.$B24]&lt;&gt;&quot;&quot;;A;&quot;&quot;)" office:value-type="float" office:value="214.938242569079" calcext:value-type="float">
            <text:p>$ 215</text:p>
          </table:table-cell>
          <table:table-cell table:style-name="ce393" table:formula="of:=+IF([.$B24]&lt;&gt;&quot;&quot;;[.C23]*[.$D$11];&quot;&quot;)" office:value-type="float" office:value="15.4195995797895" calcext:value-type="float">
            <text:p>$ 15</text:p>
          </table:table-cell>
          <table:table-cell table:style-name="ce393" table:formula="of:=+IF([.$B24]&lt;&gt;&quot;&quot;;[.D24]-[.E24];&quot;&quot;)" office:value-type="float" office:value="199.51864298929" calcext:value-type="float">
            <text:p>$ 200</text:p>
          </table:table-cell>
          <table:table-cell table:style-name="ce409" table:formula="of:=+IF([.$C24]&lt;&gt;&quot;&quot;;[.D24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4]+1)&gt;N;&quot;&quot;;([.B24]+1));&quot;&quot;)" office:value-type="float" office:value="9" calcext:value-type="float">
            <text:p>9</text:p>
          </table:table-cell>
          <table:table-cell table:style-name="ce393" table:formula="of:=+IF([.$B25]&lt;&gt;&quot;&quot;;[.C24]-[.F25];&quot;&quot;)" office:value-type="float" office:value="625.943239695882" calcext:value-type="float">
            <text:p>$ 626</text:p>
          </table:table-cell>
          <table:table-cell table:style-name="ce393" table:formula="of:=+IF([.$B25]&lt;&gt;&quot;&quot;;A;&quot;&quot;)" office:value-type="float" office:value="214.938242569079" calcext:value-type="float">
            <text:p>$ 215</text:p>
          </table:table-cell>
          <table:table-cell table:style-name="ce393" table:formula="of:=+IF([.$B25]&lt;&gt;&quot;&quot;;[.C24]*[.$D$11];&quot;&quot;)" office:value-type="float" office:value="12.4268199349502" calcext:value-type="float">
            <text:p>$ 12</text:p>
          </table:table-cell>
          <table:table-cell table:style-name="ce393" table:formula="of:=+IF([.$B25]&lt;&gt;&quot;&quot;;[.D25]-[.E25];&quot;&quot;)" office:value-type="float" office:value="202.511422634129" calcext:value-type="float">
            <text:p>$ 203</text:p>
          </table:table-cell>
          <table:table-cell table:style-name="ce409" table:formula="of:=+IF([.$C25]&lt;&gt;&quot;&quot;;[.D25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5]+1)&gt;N;&quot;&quot;;([.B25]+1));&quot;&quot;)" office:value-type="float" office:value="10" calcext:value-type="float">
            <text:p>10</text:p>
          </table:table-cell>
          <table:table-cell table:style-name="ce393" table:formula="of:=+IF([.$B26]&lt;&gt;&quot;&quot;;[.C25]-[.F26];&quot;&quot;)" office:value-type="float" office:value="420.394145722241" calcext:value-type="float">
            <text:p>$ 420</text:p>
          </table:table-cell>
          <table:table-cell table:style-name="ce393" table:formula="of:=+IF([.$B26]&lt;&gt;&quot;&quot;;A;&quot;&quot;)" office:value-type="float" office:value="214.938242569079" calcext:value-type="float">
            <text:p>$ 215</text:p>
          </table:table-cell>
          <table:table-cell table:style-name="ce393" table:formula="of:=+IF([.$B26]&lt;&gt;&quot;&quot;;[.C25]*[.$D$11];&quot;&quot;)" office:value-type="float" office:value="9.38914859543823" calcext:value-type="float">
            <text:p>$ 9</text:p>
          </table:table-cell>
          <table:table-cell table:style-name="ce393" table:formula="of:=+IF([.$B26]&lt;&gt;&quot;&quot;;[.D26]-[.E26];&quot;&quot;)" office:value-type="float" office:value="205.549093973641" calcext:value-type="float">
            <text:p>$ 206</text:p>
          </table:table-cell>
          <table:table-cell table:style-name="ce409" table:formula="of:=+IF([.$C26]&lt;&gt;&quot;&quot;;[.D26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6]+1)&gt;N;&quot;&quot;;([.B26]+1));&quot;&quot;)" office:value-type="float" office:value="11" calcext:value-type="float">
            <text:p>11</text:p>
          </table:table-cell>
          <table:table-cell table:style-name="ce393" table:formula="of:=+IF([.$B27]&lt;&gt;&quot;&quot;;[.C26]-[.F27];&quot;&quot;)" office:value-type="float" office:value="211.761815338995" calcext:value-type="float">
            <text:p>$ 212</text:p>
          </table:table-cell>
          <table:table-cell table:style-name="ce393" table:formula="of:=+IF([.$B27]&lt;&gt;&quot;&quot;;A;&quot;&quot;)" office:value-type="float" office:value="214.938242569079" calcext:value-type="float">
            <text:p>$ 215</text:p>
          </table:table-cell>
          <table:table-cell table:style-name="ce393" table:formula="of:=+IF([.$B27]&lt;&gt;&quot;&quot;;[.C26]*[.$D$11];&quot;&quot;)" office:value-type="float" office:value="6.30591218583361" calcext:value-type="float">
            <text:p>$ 6</text:p>
          </table:table-cell>
          <table:table-cell table:style-name="ce393" table:formula="of:=+IF([.$B27]&lt;&gt;&quot;&quot;;[.D27]-[.E27];&quot;&quot;)" office:value-type="float" office:value="208.632330383246" calcext:value-type="float">
            <text:p>$ 209</text:p>
          </table:table-cell>
          <table:table-cell table:style-name="ce409" table:formula="of:=+IF([.$C27]&lt;&gt;&quot;&quot;;[.D27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7]+1)&gt;N;&quot;&quot;;([.B27]+1));&quot;&quot;)" office:value-type="float" office:value="12" calcext:value-type="float">
            <text:p>12</text:p>
          </table:table-cell>
          <table:table-cell table:style-name="ce393" table:formula="of:=+IF([.$B28]&lt;&gt;&quot;&quot;;[.C27]-[.F28];&quot;&quot;)" office:value-type="float" office:value="0" calcext:value-type="float">
            <text:p>$ 0</text:p>
          </table:table-cell>
          <table:table-cell table:style-name="ce393" table:formula="of:=+IF([.$B28]&lt;&gt;&quot;&quot;;A;&quot;&quot;)" office:value-type="float" office:value="214.938242569079" calcext:value-type="float">
            <text:p>$ 215</text:p>
          </table:table-cell>
          <table:table-cell table:style-name="ce393" table:formula="of:=+IF([.$B28]&lt;&gt;&quot;&quot;;[.C27]*[.$D$11];&quot;&quot;)" office:value-type="float" office:value="3.17642723008492" calcext:value-type="float">
            <text:p>$ 3</text:p>
          </table:table-cell>
          <table:table-cell table:style-name="ce393" table:formula="of:=+IF([.$B28]&lt;&gt;&quot;&quot;;[.D28]-[.E28];&quot;&quot;)" office:value-type="float" office:value="211.761815338994" calcext:value-type="float">
            <text:p>$ 212</text:p>
          </table:table-cell>
          <table:table-cell table:style-name="ce409" table:formula="of:=+IF([.$C28]&lt;&gt;&quot;&quot;;[.D28];&quot;&quot;)" office:value-type="float" office:value="214.938242569079" calcext:value-type="float">
            <text:p>$ 215</text:p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8]+1)&gt;N;&quot;&quot;;([.B28]+1));&quot;&quot;)">
            <text:p/>
          </table:table-cell>
          <table:table-cell table:style-name="ce393" table:formula="of:=+IF([.$B29]&lt;&gt;&quot;&quot;;[.C28]-[.F29];&quot;&quot;)">
            <text:p/>
          </table:table-cell>
          <table:table-cell table:style-name="ce393" table:formula="of:=+IF([.$B29]&lt;&gt;&quot;&quot;;A;&quot;&quot;)">
            <text:p/>
          </table:table-cell>
          <table:table-cell table:style-name="ce393" table:formula="of:=+IF([.$B29]&lt;&gt;&quot;&quot;;[.C28]*[.$D$11];&quot;&quot;)">
            <text:p/>
          </table:table-cell>
          <table:table-cell table:style-name="ce393" table:formula="of:=+IF([.$B29]&lt;&gt;&quot;&quot;;[.D29]-[.E29];&quot;&quot;)">
            <text:p/>
          </table:table-cell>
          <table:table-cell table:style-name="ce409" table:formula="of:=+IF([.$C29]&lt;&gt;&quot;&quot;;[.D2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9]+1)&gt;N;&quot;&quot;;([.B29]+1));&quot;&quot;)">
            <text:p/>
          </table:table-cell>
          <table:table-cell table:style-name="ce393" table:formula="of:=+IF([.$B30]&lt;&gt;&quot;&quot;;[.C29]-[.F30];&quot;&quot;)">
            <text:p/>
          </table:table-cell>
          <table:table-cell table:style-name="ce393" table:formula="of:=+IF([.$B30]&lt;&gt;&quot;&quot;;A;&quot;&quot;)">
            <text:p/>
          </table:table-cell>
          <table:table-cell table:style-name="ce393" table:formula="of:=+IF([.$B30]&lt;&gt;&quot;&quot;;[.C29]*[.$D$11];&quot;&quot;)">
            <text:p/>
          </table:table-cell>
          <table:table-cell table:style-name="ce393" table:formula="of:=+IF([.$B30]&lt;&gt;&quot;&quot;;[.D30]-[.E30];&quot;&quot;)">
            <text:p/>
          </table:table-cell>
          <table:table-cell table:style-name="ce409" table:formula="of:=+IF([.$C30]&lt;&gt;&quot;&quot;;[.D3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0]+1)&gt;N;&quot;&quot;;([.B30]+1));&quot;&quot;)">
            <text:p/>
          </table:table-cell>
          <table:table-cell table:style-name="ce393" table:formula="of:=+IF([.$B31]&lt;&gt;&quot;&quot;;[.C30]-[.F31];&quot;&quot;)">
            <text:p/>
          </table:table-cell>
          <table:table-cell table:style-name="ce393" table:formula="of:=+IF([.$B31]&lt;&gt;&quot;&quot;;A;&quot;&quot;)">
            <text:p/>
          </table:table-cell>
          <table:table-cell table:style-name="ce393" table:formula="of:=+IF([.$B31]&lt;&gt;&quot;&quot;;[.C30]*[.$D$11];&quot;&quot;)">
            <text:p/>
          </table:table-cell>
          <table:table-cell table:style-name="ce393" table:formula="of:=+IF([.$B31]&lt;&gt;&quot;&quot;;[.D31]-[.E31];&quot;&quot;)">
            <text:p/>
          </table:table-cell>
          <table:table-cell table:style-name="ce409" table:formula="of:=+IF([.$C31]&lt;&gt;&quot;&quot;;[.D3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1]+1)&gt;N;&quot;&quot;;([.B31]+1));&quot;&quot;)">
            <text:p/>
          </table:table-cell>
          <table:table-cell table:style-name="ce393" table:formula="of:=+IF([.$B32]&lt;&gt;&quot;&quot;;[.C31]-[.F32];&quot;&quot;)">
            <text:p/>
          </table:table-cell>
          <table:table-cell table:style-name="ce393" table:formula="of:=+IF([.$B32]&lt;&gt;&quot;&quot;;A;&quot;&quot;)">
            <text:p/>
          </table:table-cell>
          <table:table-cell table:style-name="ce393" table:formula="of:=+IF([.$B32]&lt;&gt;&quot;&quot;;[.C31]*[.$D$11];&quot;&quot;)">
            <text:p/>
          </table:table-cell>
          <table:table-cell table:style-name="ce393" table:formula="of:=+IF([.$B32]&lt;&gt;&quot;&quot;;[.D32]-[.E32];&quot;&quot;)">
            <text:p/>
          </table:table-cell>
          <table:table-cell table:style-name="ce409" table:formula="of:=+IF([.$C32]&lt;&gt;&quot;&quot;;[.D3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2]+1)&gt;N;&quot;&quot;;([.B32]+1));&quot;&quot;)">
            <text:p/>
          </table:table-cell>
          <table:table-cell table:style-name="ce393" table:formula="of:=+IF([.$B33]&lt;&gt;&quot;&quot;;[.C32]-[.F33];&quot;&quot;)">
            <text:p/>
          </table:table-cell>
          <table:table-cell table:style-name="ce393" table:formula="of:=+IF([.$B33]&lt;&gt;&quot;&quot;;A;&quot;&quot;)">
            <text:p/>
          </table:table-cell>
          <table:table-cell table:style-name="ce393" table:formula="of:=+IF([.$B33]&lt;&gt;&quot;&quot;;[.C32]*[.$D$11];&quot;&quot;)">
            <text:p/>
          </table:table-cell>
          <table:table-cell table:style-name="ce393" table:formula="of:=+IF([.$B33]&lt;&gt;&quot;&quot;;[.D33]-[.E33];&quot;&quot;)">
            <text:p/>
          </table:table-cell>
          <table:table-cell table:style-name="ce409" table:formula="of:=+IF([.$C33]&lt;&gt;&quot;&quot;;[.D3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3]+1)&gt;N;&quot;&quot;;([.B33]+1));&quot;&quot;)">
            <text:p/>
          </table:table-cell>
          <table:table-cell table:style-name="ce393" table:formula="of:=+IF([.$B34]&lt;&gt;&quot;&quot;;[.C33]-[.F34];&quot;&quot;)">
            <text:p/>
          </table:table-cell>
          <table:table-cell table:style-name="ce393" table:formula="of:=+IF([.$B34]&lt;&gt;&quot;&quot;;A;&quot;&quot;)">
            <text:p/>
          </table:table-cell>
          <table:table-cell table:style-name="ce393" table:formula="of:=+IF([.$B34]&lt;&gt;&quot;&quot;;[.C33]*[.$D$11];&quot;&quot;)">
            <text:p/>
          </table:table-cell>
          <table:table-cell table:style-name="ce393" table:formula="of:=+IF([.$B34]&lt;&gt;&quot;&quot;;[.D34]-[.E34];&quot;&quot;)">
            <text:p/>
          </table:table-cell>
          <table:table-cell table:style-name="ce409" table:formula="of:=+IF([.$C34]&lt;&gt;&quot;&quot;;[.D3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4]+1)&gt;N;&quot;&quot;;([.B34]+1));&quot;&quot;)">
            <text:p/>
          </table:table-cell>
          <table:table-cell table:style-name="ce393" table:formula="of:=+IF([.$B35]&lt;&gt;&quot;&quot;;[.C34]-[.F35];&quot;&quot;)">
            <text:p/>
          </table:table-cell>
          <table:table-cell table:style-name="ce393" table:formula="of:=+IF([.$B35]&lt;&gt;&quot;&quot;;A;&quot;&quot;)">
            <text:p/>
          </table:table-cell>
          <table:table-cell table:style-name="ce393" table:formula="of:=+IF([.$B35]&lt;&gt;&quot;&quot;;[.C34]*[.$D$11];&quot;&quot;)">
            <text:p/>
          </table:table-cell>
          <table:table-cell table:style-name="ce393" table:formula="of:=+IF([.$B35]&lt;&gt;&quot;&quot;;[.D35]-[.E35];&quot;&quot;)">
            <text:p/>
          </table:table-cell>
          <table:table-cell table:style-name="ce409" table:formula="of:=+IF([.$C35]&lt;&gt;&quot;&quot;;[.D3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5]+1)&gt;N;&quot;&quot;;([.B35]+1));&quot;&quot;)">
            <text:p/>
          </table:table-cell>
          <table:table-cell table:style-name="ce393" table:formula="of:=+IF([.$B36]&lt;&gt;&quot;&quot;;[.C35]-[.F36];&quot;&quot;)">
            <text:p/>
          </table:table-cell>
          <table:table-cell table:style-name="ce393" table:formula="of:=+IF([.$B36]&lt;&gt;&quot;&quot;;A;&quot;&quot;)">
            <text:p/>
          </table:table-cell>
          <table:table-cell table:style-name="ce393" table:formula="of:=+IF([.$B36]&lt;&gt;&quot;&quot;;[.C35]*[.$D$11];&quot;&quot;)">
            <text:p/>
          </table:table-cell>
          <table:table-cell table:style-name="ce393" table:formula="of:=+IF([.$B36]&lt;&gt;&quot;&quot;;[.D36]-[.E36];&quot;&quot;)">
            <text:p/>
          </table:table-cell>
          <table:table-cell table:style-name="ce409" table:formula="of:=+IF([.$C36]&lt;&gt;&quot;&quot;;[.D3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6]+1)&gt;N;&quot;&quot;;([.B36]+1));&quot;&quot;)">
            <text:p/>
          </table:table-cell>
          <table:table-cell table:style-name="ce393" table:formula="of:=+IF([.$B37]&lt;&gt;&quot;&quot;;[.C36]-[.F37];&quot;&quot;)">
            <text:p/>
          </table:table-cell>
          <table:table-cell table:style-name="ce393" table:formula="of:=+IF([.$B37]&lt;&gt;&quot;&quot;;A;&quot;&quot;)">
            <text:p/>
          </table:table-cell>
          <table:table-cell table:style-name="ce393" table:formula="of:=+IF([.$B37]&lt;&gt;&quot;&quot;;[.C36]*[.$D$11];&quot;&quot;)">
            <text:p/>
          </table:table-cell>
          <table:table-cell table:style-name="ce393" table:formula="of:=+IF([.$B37]&lt;&gt;&quot;&quot;;[.D37]-[.E37];&quot;&quot;)">
            <text:p/>
          </table:table-cell>
          <table:table-cell table:style-name="ce409" table:formula="of:=+IF([.$C37]&lt;&gt;&quot;&quot;;[.D3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7]+1)&gt;N;&quot;&quot;;([.B37]+1));&quot;&quot;)">
            <text:p/>
          </table:table-cell>
          <table:table-cell table:style-name="ce393" table:formula="of:=+IF([.$B38]&lt;&gt;&quot;&quot;;[.C37]-[.F38];&quot;&quot;)">
            <text:p/>
          </table:table-cell>
          <table:table-cell table:style-name="ce393" table:formula="of:=+IF([.$B38]&lt;&gt;&quot;&quot;;A;&quot;&quot;)">
            <text:p/>
          </table:table-cell>
          <table:table-cell table:style-name="ce393" table:formula="of:=+IF([.$B38]&lt;&gt;&quot;&quot;;[.C37]*[.$D$11];&quot;&quot;)">
            <text:p/>
          </table:table-cell>
          <table:table-cell table:style-name="ce393" table:formula="of:=+IF([.$B38]&lt;&gt;&quot;&quot;;[.D38]-[.E38];&quot;&quot;)">
            <text:p/>
          </table:table-cell>
          <table:table-cell table:style-name="ce409" table:formula="of:=+IF([.$C38]&lt;&gt;&quot;&quot;;[.D3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8]+1)&gt;N;&quot;&quot;;([.B38]+1));&quot;&quot;)">
            <text:p/>
          </table:table-cell>
          <table:table-cell table:style-name="ce393" table:formula="of:=+IF([.$B39]&lt;&gt;&quot;&quot;;[.C38]-[.F39];&quot;&quot;)">
            <text:p/>
          </table:table-cell>
          <table:table-cell table:style-name="ce393" table:formula="of:=+IF([.$B39]&lt;&gt;&quot;&quot;;A;&quot;&quot;)">
            <text:p/>
          </table:table-cell>
          <table:table-cell table:style-name="ce393" table:formula="of:=+IF([.$B39]&lt;&gt;&quot;&quot;;[.C38]*[.$D$11];&quot;&quot;)">
            <text:p/>
          </table:table-cell>
          <table:table-cell table:style-name="ce393" table:formula="of:=+IF([.$B39]&lt;&gt;&quot;&quot;;[.D39]-[.E39];&quot;&quot;)">
            <text:p/>
          </table:table-cell>
          <table:table-cell table:style-name="ce409" table:formula="of:=+IF([.$C39]&lt;&gt;&quot;&quot;;[.D3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39]+1)&gt;N;&quot;&quot;;([.B39]+1));&quot;&quot;)">
            <text:p/>
          </table:table-cell>
          <table:table-cell table:style-name="ce393" table:formula="of:=+IF([.$B40]&lt;&gt;&quot;&quot;;[.C39]-[.F40];&quot;&quot;)">
            <text:p/>
          </table:table-cell>
          <table:table-cell table:style-name="ce393" table:formula="of:=+IF([.$B40]&lt;&gt;&quot;&quot;;A;&quot;&quot;)">
            <text:p/>
          </table:table-cell>
          <table:table-cell table:style-name="ce393" table:formula="of:=+IF([.$B40]&lt;&gt;&quot;&quot;;[.C39]*[.$D$11];&quot;&quot;)">
            <text:p/>
          </table:table-cell>
          <table:table-cell table:style-name="ce393" table:formula="of:=+IF([.$B40]&lt;&gt;&quot;&quot;;[.D40]-[.E40];&quot;&quot;)">
            <text:p/>
          </table:table-cell>
          <table:table-cell table:style-name="ce409" table:formula="of:=+IF([.$C40]&lt;&gt;&quot;&quot;;[.D4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0]+1)&gt;N;&quot;&quot;;([.B40]+1));&quot;&quot;)">
            <text:p/>
          </table:table-cell>
          <table:table-cell table:style-name="ce393" table:formula="of:=+IF([.$B41]&lt;&gt;&quot;&quot;;[.C40]-[.F41];&quot;&quot;)">
            <text:p/>
          </table:table-cell>
          <table:table-cell table:style-name="ce393" table:formula="of:=+IF([.$B41]&lt;&gt;&quot;&quot;;A;&quot;&quot;)">
            <text:p/>
          </table:table-cell>
          <table:table-cell table:style-name="ce393" table:formula="of:=+IF([.$B41]&lt;&gt;&quot;&quot;;[.C40]*[.$D$11];&quot;&quot;)">
            <text:p/>
          </table:table-cell>
          <table:table-cell table:style-name="ce393" table:formula="of:=+IF([.$B41]&lt;&gt;&quot;&quot;;[.D41]-[.E41];&quot;&quot;)">
            <text:p/>
          </table:table-cell>
          <table:table-cell table:style-name="ce409" table:formula="of:=+IF([.$C41]&lt;&gt;&quot;&quot;;[.D4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1]+1)&gt;N;&quot;&quot;;([.B41]+1));&quot;&quot;)">
            <text:p/>
          </table:table-cell>
          <table:table-cell table:style-name="ce393" table:formula="of:=+IF([.$B42]&lt;&gt;&quot;&quot;;[.C41]-[.F42];&quot;&quot;)">
            <text:p/>
          </table:table-cell>
          <table:table-cell table:style-name="ce393" table:formula="of:=+IF([.$B42]&lt;&gt;&quot;&quot;;A;&quot;&quot;)">
            <text:p/>
          </table:table-cell>
          <table:table-cell table:style-name="ce393" table:formula="of:=+IF([.$B42]&lt;&gt;&quot;&quot;;[.C41]*[.$D$11];&quot;&quot;)">
            <text:p/>
          </table:table-cell>
          <table:table-cell table:style-name="ce393" table:formula="of:=+IF([.$B42]&lt;&gt;&quot;&quot;;[.D42]-[.E42];&quot;&quot;)">
            <text:p/>
          </table:table-cell>
          <table:table-cell table:style-name="ce409" table:formula="of:=+IF([.$C42]&lt;&gt;&quot;&quot;;[.D4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2]+1)&gt;N;&quot;&quot;;([.B42]+1));&quot;&quot;)">
            <text:p/>
          </table:table-cell>
          <table:table-cell table:style-name="ce393" table:formula="of:=+IF([.$B43]&lt;&gt;&quot;&quot;;[.C42]-[.F43];&quot;&quot;)">
            <text:p/>
          </table:table-cell>
          <table:table-cell table:style-name="ce393" table:formula="of:=+IF([.$B43]&lt;&gt;&quot;&quot;;A;&quot;&quot;)">
            <text:p/>
          </table:table-cell>
          <table:table-cell table:style-name="ce393" table:formula="of:=+IF([.$B43]&lt;&gt;&quot;&quot;;[.C42]*[.$D$11];&quot;&quot;)">
            <text:p/>
          </table:table-cell>
          <table:table-cell table:style-name="ce393" table:formula="of:=+IF([.$B43]&lt;&gt;&quot;&quot;;[.D43]-[.E43];&quot;&quot;)">
            <text:p/>
          </table:table-cell>
          <table:table-cell table:style-name="ce409" table:formula="of:=+IF([.$C43]&lt;&gt;&quot;&quot;;[.D4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3]+1)&gt;N;&quot;&quot;;([.B43]+1));&quot;&quot;)">
            <text:p/>
          </table:table-cell>
          <table:table-cell table:style-name="ce393" table:formula="of:=+IF([.$B44]&lt;&gt;&quot;&quot;;[.C43]-[.F44];&quot;&quot;)">
            <text:p/>
          </table:table-cell>
          <table:table-cell table:style-name="ce393" table:formula="of:=+IF([.$B44]&lt;&gt;&quot;&quot;;A;&quot;&quot;)">
            <text:p/>
          </table:table-cell>
          <table:table-cell table:style-name="ce393" table:formula="of:=+IF([.$B44]&lt;&gt;&quot;&quot;;[.C43]*[.$D$11];&quot;&quot;)">
            <text:p/>
          </table:table-cell>
          <table:table-cell table:style-name="ce393" table:formula="of:=+IF([.$B44]&lt;&gt;&quot;&quot;;[.D44]-[.E44];&quot;&quot;)">
            <text:p/>
          </table:table-cell>
          <table:table-cell table:style-name="ce409" table:formula="of:=+IF([.$C44]&lt;&gt;&quot;&quot;;[.D4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4]+1)&gt;N;&quot;&quot;;([.B44]+1));&quot;&quot;)">
            <text:p/>
          </table:table-cell>
          <table:table-cell table:style-name="ce393" table:formula="of:=+IF([.$B45]&lt;&gt;&quot;&quot;;[.C44]-[.F45];&quot;&quot;)">
            <text:p/>
          </table:table-cell>
          <table:table-cell table:style-name="ce393" table:formula="of:=+IF([.$B45]&lt;&gt;&quot;&quot;;A;&quot;&quot;)">
            <text:p/>
          </table:table-cell>
          <table:table-cell table:style-name="ce393" table:formula="of:=+IF([.$B45]&lt;&gt;&quot;&quot;;[.C44]*[.$D$11];&quot;&quot;)">
            <text:p/>
          </table:table-cell>
          <table:table-cell table:style-name="ce393" table:formula="of:=+IF([.$B45]&lt;&gt;&quot;&quot;;[.D45]-[.E45];&quot;&quot;)">
            <text:p/>
          </table:table-cell>
          <table:table-cell table:style-name="ce409" table:formula="of:=+IF([.$C45]&lt;&gt;&quot;&quot;;[.D4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5]+1)&gt;N;&quot;&quot;;([.B45]+1));&quot;&quot;)">
            <text:p/>
          </table:table-cell>
          <table:table-cell table:style-name="ce393" table:formula="of:=+IF([.$B46]&lt;&gt;&quot;&quot;;[.C45]-[.F46];&quot;&quot;)">
            <text:p/>
          </table:table-cell>
          <table:table-cell table:style-name="ce393" table:formula="of:=+IF([.$B46]&lt;&gt;&quot;&quot;;A;&quot;&quot;)">
            <text:p/>
          </table:table-cell>
          <table:table-cell table:style-name="ce393" table:formula="of:=+IF([.$B46]&lt;&gt;&quot;&quot;;[.C45]*[.$D$11];&quot;&quot;)">
            <text:p/>
          </table:table-cell>
          <table:table-cell table:style-name="ce393" table:formula="of:=+IF([.$B46]&lt;&gt;&quot;&quot;;[.D46]-[.E46];&quot;&quot;)">
            <text:p/>
          </table:table-cell>
          <table:table-cell table:style-name="ce409" table:formula="of:=+IF([.$C46]&lt;&gt;&quot;&quot;;[.D4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6]+1)&gt;N;&quot;&quot;;([.B46]+1));&quot;&quot;)">
            <text:p/>
          </table:table-cell>
          <table:table-cell table:style-name="ce393" table:formula="of:=+IF([.$B47]&lt;&gt;&quot;&quot;;[.C46]-[.F47];&quot;&quot;)">
            <text:p/>
          </table:table-cell>
          <table:table-cell table:style-name="ce393" table:formula="of:=+IF([.$B47]&lt;&gt;&quot;&quot;;A;&quot;&quot;)">
            <text:p/>
          </table:table-cell>
          <table:table-cell table:style-name="ce393" table:formula="of:=+IF([.$B47]&lt;&gt;&quot;&quot;;[.C46]*[.$D$11];&quot;&quot;)">
            <text:p/>
          </table:table-cell>
          <table:table-cell table:style-name="ce393" table:formula="of:=+IF([.$B47]&lt;&gt;&quot;&quot;;[.D47]-[.E47];&quot;&quot;)">
            <text:p/>
          </table:table-cell>
          <table:table-cell table:style-name="ce409" table:formula="of:=+IF([.$C47]&lt;&gt;&quot;&quot;;[.D4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7]+1)&gt;N;&quot;&quot;;([.B47]+1));&quot;&quot;)">
            <text:p/>
          </table:table-cell>
          <table:table-cell table:style-name="ce393" table:formula="of:=+IF([.$B48]&lt;&gt;&quot;&quot;;[.C47]-[.F48];&quot;&quot;)">
            <text:p/>
          </table:table-cell>
          <table:table-cell table:style-name="ce393" table:formula="of:=+IF([.$B48]&lt;&gt;&quot;&quot;;A;&quot;&quot;)">
            <text:p/>
          </table:table-cell>
          <table:table-cell table:style-name="ce393" table:formula="of:=+IF([.$B48]&lt;&gt;&quot;&quot;;[.C47]*[.$D$11];&quot;&quot;)">
            <text:p/>
          </table:table-cell>
          <table:table-cell table:style-name="ce393" table:formula="of:=+IF([.$B48]&lt;&gt;&quot;&quot;;[.D48]-[.E48];&quot;&quot;)">
            <text:p/>
          </table:table-cell>
          <table:table-cell table:style-name="ce409" table:formula="of:=+IF([.$C48]&lt;&gt;&quot;&quot;;[.D4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8]+1)&gt;N;&quot;&quot;;([.B48]+1));&quot;&quot;)">
            <text:p/>
          </table:table-cell>
          <table:table-cell table:style-name="ce393" table:formula="of:=+IF([.$B49]&lt;&gt;&quot;&quot;;[.C48]-[.F49];&quot;&quot;)">
            <text:p/>
          </table:table-cell>
          <table:table-cell table:style-name="ce393" table:formula="of:=+IF([.$B49]&lt;&gt;&quot;&quot;;A;&quot;&quot;)">
            <text:p/>
          </table:table-cell>
          <table:table-cell table:style-name="ce393" table:formula="of:=+IF([.$B49]&lt;&gt;&quot;&quot;;[.C48]*[.$D$11];&quot;&quot;)">
            <text:p/>
          </table:table-cell>
          <table:table-cell table:style-name="ce393" table:formula="of:=+IF([.$B49]&lt;&gt;&quot;&quot;;[.D49]-[.E49];&quot;&quot;)">
            <text:p/>
          </table:table-cell>
          <table:table-cell table:style-name="ce409" table:formula="of:=+IF([.$C49]&lt;&gt;&quot;&quot;;[.D4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49]+1)&gt;N;&quot;&quot;;([.B49]+1));&quot;&quot;)">
            <text:p/>
          </table:table-cell>
          <table:table-cell table:style-name="ce393" table:formula="of:=+IF([.$B50]&lt;&gt;&quot;&quot;;[.C49]-[.F50];&quot;&quot;)">
            <text:p/>
          </table:table-cell>
          <table:table-cell table:style-name="ce393" table:formula="of:=+IF([.$B50]&lt;&gt;&quot;&quot;;A;&quot;&quot;)">
            <text:p/>
          </table:table-cell>
          <table:table-cell table:style-name="ce393" table:formula="of:=+IF([.$B50]&lt;&gt;&quot;&quot;;[.C49]*[.$D$11];&quot;&quot;)">
            <text:p/>
          </table:table-cell>
          <table:table-cell table:style-name="ce393" table:formula="of:=+IF([.$B50]&lt;&gt;&quot;&quot;;[.D50]-[.E50];&quot;&quot;)">
            <text:p/>
          </table:table-cell>
          <table:table-cell table:style-name="ce409" table:formula="of:=+IF([.$C50]&lt;&gt;&quot;&quot;;[.D5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0]+1)&gt;N;&quot;&quot;;([.B50]+1));&quot;&quot;)">
            <text:p/>
          </table:table-cell>
          <table:table-cell table:style-name="ce393" table:formula="of:=+IF([.$B51]&lt;&gt;&quot;&quot;;[.C50]-[.F51];&quot;&quot;)">
            <text:p/>
          </table:table-cell>
          <table:table-cell table:style-name="ce393" table:formula="of:=+IF([.$B51]&lt;&gt;&quot;&quot;;A;&quot;&quot;)">
            <text:p/>
          </table:table-cell>
          <table:table-cell table:style-name="ce393" table:formula="of:=+IF([.$B51]&lt;&gt;&quot;&quot;;[.C50]*[.$D$11];&quot;&quot;)">
            <text:p/>
          </table:table-cell>
          <table:table-cell table:style-name="ce393" table:formula="of:=+IF([.$B51]&lt;&gt;&quot;&quot;;[.D51]-[.E51];&quot;&quot;)">
            <text:p/>
          </table:table-cell>
          <table:table-cell table:style-name="ce409" table:formula="of:=+IF([.$C51]&lt;&gt;&quot;&quot;;[.D5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6" table:formula="of:=+IFERROR(IF(([.B51]+1)&gt;N;&quot;&quot;;([.B51]+1));&quot;&quot;)">
            <text:p/>
          </table:table-cell>
          <table:table-cell table:style-name="ce394" table:formula="of:=+IF([.$B52]&lt;&gt;&quot;&quot;;[.C51]-[.F52];&quot;&quot;)">
            <text:p/>
          </table:table-cell>
          <table:table-cell table:style-name="ce394" table:formula="of:=+IF([.$B52]&lt;&gt;&quot;&quot;;A;&quot;&quot;)">
            <text:p/>
          </table:table-cell>
          <table:table-cell table:style-name="ce394" table:formula="of:=+IF([.$B52]&lt;&gt;&quot;&quot;;[.C51]*[.$D$11];&quot;&quot;)">
            <text:p/>
          </table:table-cell>
          <table:table-cell table:style-name="ce394" table:formula="of:=+IF([.$B52]&lt;&gt;&quot;&quot;;[.D52]-[.E52];&quot;&quot;)">
            <text:p/>
          </table:table-cell>
          <table:table-cell table:style-name="ce410" table:formula="of:=+IF([.$C52]&lt;&gt;&quot;&quot;;[.D5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2]+1)&gt;N;&quot;&quot;;([.B52]+1));&quot;&quot;)">
            <text:p/>
          </table:table-cell>
          <table:table-cell table:style-name="ce393" table:formula="of:=+IF([.$B53]&lt;&gt;&quot;&quot;;[.C52]-[.F53];&quot;&quot;)">
            <text:p/>
          </table:table-cell>
          <table:table-cell table:style-name="ce393" table:formula="of:=+IF([.$B53]&lt;&gt;&quot;&quot;;A;&quot;&quot;)">
            <text:p/>
          </table:table-cell>
          <table:table-cell table:style-name="ce393" table:formula="of:=+IF([.$B53]&lt;&gt;&quot;&quot;;[.C52]*[.$D$11];&quot;&quot;)">
            <text:p/>
          </table:table-cell>
          <table:table-cell table:style-name="ce393" table:formula="of:=+IF([.$B53]&lt;&gt;&quot;&quot;;[.D53]-[.E53];&quot;&quot;)">
            <text:p/>
          </table:table-cell>
          <table:table-cell table:style-name="ce409" table:formula="of:=+IF([.$C53]&lt;&gt;&quot;&quot;;[.D5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3]+1)&gt;N;&quot;&quot;;([.B53]+1));&quot;&quot;)">
            <text:p/>
          </table:table-cell>
          <table:table-cell table:style-name="ce393" table:formula="of:=+IF([.$B54]&lt;&gt;&quot;&quot;;[.C53]-[.F54];&quot;&quot;)">
            <text:p/>
          </table:table-cell>
          <table:table-cell table:style-name="ce393" table:formula="of:=+IF([.$B54]&lt;&gt;&quot;&quot;;A;&quot;&quot;)">
            <text:p/>
          </table:table-cell>
          <table:table-cell table:style-name="ce393" table:formula="of:=+IF([.$B54]&lt;&gt;&quot;&quot;;[.C53]*[.$D$11];&quot;&quot;)">
            <text:p/>
          </table:table-cell>
          <table:table-cell table:style-name="ce393" table:formula="of:=+IF([.$B54]&lt;&gt;&quot;&quot;;[.D54]-[.E54];&quot;&quot;)">
            <text:p/>
          </table:table-cell>
          <table:table-cell table:style-name="ce409" table:formula="of:=+IF([.$C54]&lt;&gt;&quot;&quot;;[.D5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4]+1)&gt;N;&quot;&quot;;([.B54]+1));&quot;&quot;)">
            <text:p/>
          </table:table-cell>
          <table:table-cell table:style-name="ce393" table:formula="of:=+IF([.$B55]&lt;&gt;&quot;&quot;;[.C54]-[.F55];&quot;&quot;)">
            <text:p/>
          </table:table-cell>
          <table:table-cell table:style-name="ce393" table:formula="of:=+IF([.$B55]&lt;&gt;&quot;&quot;;A;&quot;&quot;)">
            <text:p/>
          </table:table-cell>
          <table:table-cell table:style-name="ce393" table:formula="of:=+IF([.$B55]&lt;&gt;&quot;&quot;;[.C54]*[.$D$11];&quot;&quot;)">
            <text:p/>
          </table:table-cell>
          <table:table-cell table:style-name="ce393" table:formula="of:=+IF([.$B55]&lt;&gt;&quot;&quot;;[.D55]-[.E55];&quot;&quot;)">
            <text:p/>
          </table:table-cell>
          <table:table-cell table:style-name="ce409" table:formula="of:=+IF([.$C55]&lt;&gt;&quot;&quot;;[.D5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5]+1)&gt;N;&quot;&quot;;([.B55]+1));&quot;&quot;)">
            <text:p/>
          </table:table-cell>
          <table:table-cell table:style-name="ce393" table:formula="of:=+IF([.$B56]&lt;&gt;&quot;&quot;;[.C55]-[.F56];&quot;&quot;)">
            <text:p/>
          </table:table-cell>
          <table:table-cell table:style-name="ce393" table:formula="of:=+IF([.$B56]&lt;&gt;&quot;&quot;;A;&quot;&quot;)">
            <text:p/>
          </table:table-cell>
          <table:table-cell table:style-name="ce393" table:formula="of:=+IF([.$B56]&lt;&gt;&quot;&quot;;[.C55]*[.$D$11];&quot;&quot;)">
            <text:p/>
          </table:table-cell>
          <table:table-cell table:style-name="ce393" table:formula="of:=+IF([.$B56]&lt;&gt;&quot;&quot;;[.D56]-[.E56];&quot;&quot;)">
            <text:p/>
          </table:table-cell>
          <table:table-cell table:style-name="ce409" table:formula="of:=+IF([.$C56]&lt;&gt;&quot;&quot;;[.D5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6]+1)&gt;N;&quot;&quot;;([.B56]+1));&quot;&quot;)">
            <text:p/>
          </table:table-cell>
          <table:table-cell table:style-name="ce393" table:formula="of:=+IF([.$B57]&lt;&gt;&quot;&quot;;[.C56]-[.F57];&quot;&quot;)">
            <text:p/>
          </table:table-cell>
          <table:table-cell table:style-name="ce393" table:formula="of:=+IF([.$B57]&lt;&gt;&quot;&quot;;A;&quot;&quot;)">
            <text:p/>
          </table:table-cell>
          <table:table-cell table:style-name="ce393" table:formula="of:=+IF([.$B57]&lt;&gt;&quot;&quot;;[.C56]*[.$D$11];&quot;&quot;)">
            <text:p/>
          </table:table-cell>
          <table:table-cell table:style-name="ce393" table:formula="of:=+IF([.$B57]&lt;&gt;&quot;&quot;;[.D57]-[.E57];&quot;&quot;)">
            <text:p/>
          </table:table-cell>
          <table:table-cell table:style-name="ce409" table:formula="of:=+IF([.$C57]&lt;&gt;&quot;&quot;;[.D5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7]+1)&gt;N;&quot;&quot;;([.B57]+1));&quot;&quot;)">
            <text:p/>
          </table:table-cell>
          <table:table-cell table:style-name="ce393" table:formula="of:=+IF([.$B58]&lt;&gt;&quot;&quot;;[.C57]-[.F58];&quot;&quot;)">
            <text:p/>
          </table:table-cell>
          <table:table-cell table:style-name="ce393" table:formula="of:=+IF([.$B58]&lt;&gt;&quot;&quot;;A;&quot;&quot;)">
            <text:p/>
          </table:table-cell>
          <table:table-cell table:style-name="ce393" table:formula="of:=+IF([.$B58]&lt;&gt;&quot;&quot;;[.C57]*[.$D$11];&quot;&quot;)">
            <text:p/>
          </table:table-cell>
          <table:table-cell table:style-name="ce393" table:formula="of:=+IF([.$B58]&lt;&gt;&quot;&quot;;[.D58]-[.E58];&quot;&quot;)">
            <text:p/>
          </table:table-cell>
          <table:table-cell table:style-name="ce409" table:formula="of:=+IF([.$C58]&lt;&gt;&quot;&quot;;[.D5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8]+1)&gt;N;&quot;&quot;;([.B58]+1));&quot;&quot;)">
            <text:p/>
          </table:table-cell>
          <table:table-cell table:style-name="ce393" table:formula="of:=+IF([.$B59]&lt;&gt;&quot;&quot;;[.C58]-[.F59];&quot;&quot;)">
            <text:p/>
          </table:table-cell>
          <table:table-cell table:style-name="ce393" table:formula="of:=+IF([.$B59]&lt;&gt;&quot;&quot;;A;&quot;&quot;)">
            <text:p/>
          </table:table-cell>
          <table:table-cell table:style-name="ce393" table:formula="of:=+IF([.$B59]&lt;&gt;&quot;&quot;;[.C58]*[.$D$11];&quot;&quot;)">
            <text:p/>
          </table:table-cell>
          <table:table-cell table:style-name="ce393" table:formula="of:=+IF([.$B59]&lt;&gt;&quot;&quot;;[.D59]-[.E59];&quot;&quot;)">
            <text:p/>
          </table:table-cell>
          <table:table-cell table:style-name="ce409" table:formula="of:=+IF([.$C59]&lt;&gt;&quot;&quot;;[.D5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59]+1)&gt;N;&quot;&quot;;([.B59]+1));&quot;&quot;)">
            <text:p/>
          </table:table-cell>
          <table:table-cell table:style-name="ce393" table:formula="of:=+IF([.$B60]&lt;&gt;&quot;&quot;;[.C59]-[.F60];&quot;&quot;)">
            <text:p/>
          </table:table-cell>
          <table:table-cell table:style-name="ce393" table:formula="of:=+IF([.$B60]&lt;&gt;&quot;&quot;;A;&quot;&quot;)">
            <text:p/>
          </table:table-cell>
          <table:table-cell table:style-name="ce393" table:formula="of:=+IF([.$B60]&lt;&gt;&quot;&quot;;[.C59]*[.$D$11];&quot;&quot;)">
            <text:p/>
          </table:table-cell>
          <table:table-cell table:style-name="ce393" table:formula="of:=+IF([.$B60]&lt;&gt;&quot;&quot;;[.D60]-[.E60];&quot;&quot;)">
            <text:p/>
          </table:table-cell>
          <table:table-cell table:style-name="ce409" table:formula="of:=+IF([.$C60]&lt;&gt;&quot;&quot;;[.D6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0]+1)&gt;N;&quot;&quot;;([.B60]+1));&quot;&quot;)">
            <text:p/>
          </table:table-cell>
          <table:table-cell table:style-name="ce393" table:formula="of:=+IF([.$B61]&lt;&gt;&quot;&quot;;[.C60]-[.F61];&quot;&quot;)">
            <text:p/>
          </table:table-cell>
          <table:table-cell table:style-name="ce393" table:formula="of:=+IF([.$B61]&lt;&gt;&quot;&quot;;A;&quot;&quot;)">
            <text:p/>
          </table:table-cell>
          <table:table-cell table:style-name="ce393" table:formula="of:=+IF([.$B61]&lt;&gt;&quot;&quot;;[.C60]*[.$D$11];&quot;&quot;)">
            <text:p/>
          </table:table-cell>
          <table:table-cell table:style-name="ce393" table:formula="of:=+IF([.$B61]&lt;&gt;&quot;&quot;;[.D61]-[.E61];&quot;&quot;)">
            <text:p/>
          </table:table-cell>
          <table:table-cell table:style-name="ce409" table:formula="of:=+IF([.$C61]&lt;&gt;&quot;&quot;;[.D6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1]+1)&gt;N;&quot;&quot;;([.B61]+1));&quot;&quot;)">
            <text:p/>
          </table:table-cell>
          <table:table-cell table:style-name="ce393" table:formula="of:=+IF([.$B62]&lt;&gt;&quot;&quot;;[.C61]-[.F62];&quot;&quot;)">
            <text:p/>
          </table:table-cell>
          <table:table-cell table:style-name="ce393" table:formula="of:=+IF([.$B62]&lt;&gt;&quot;&quot;;A;&quot;&quot;)">
            <text:p/>
          </table:table-cell>
          <table:table-cell table:style-name="ce393" table:formula="of:=+IF([.$B62]&lt;&gt;&quot;&quot;;[.C61]*[.$D$11];&quot;&quot;)">
            <text:p/>
          </table:table-cell>
          <table:table-cell table:style-name="ce393" table:formula="of:=+IF([.$B62]&lt;&gt;&quot;&quot;;[.D62]-[.E62];&quot;&quot;)">
            <text:p/>
          </table:table-cell>
          <table:table-cell table:style-name="ce409" table:formula="of:=+IF([.$C62]&lt;&gt;&quot;&quot;;[.D6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2]+1)&gt;N;&quot;&quot;;([.B62]+1));&quot;&quot;)">
            <text:p/>
          </table:table-cell>
          <table:table-cell table:style-name="ce393" table:formula="of:=+IF([.$B63]&lt;&gt;&quot;&quot;;[.C62]-[.F63];&quot;&quot;)">
            <text:p/>
          </table:table-cell>
          <table:table-cell table:style-name="ce393" table:formula="of:=+IF([.$B63]&lt;&gt;&quot;&quot;;A;&quot;&quot;)">
            <text:p/>
          </table:table-cell>
          <table:table-cell table:style-name="ce393" table:formula="of:=+IF([.$B63]&lt;&gt;&quot;&quot;;[.C62]*[.$D$11];&quot;&quot;)">
            <text:p/>
          </table:table-cell>
          <table:table-cell table:style-name="ce393" table:formula="of:=+IF([.$B63]&lt;&gt;&quot;&quot;;[.D63]-[.E63];&quot;&quot;)">
            <text:p/>
          </table:table-cell>
          <table:table-cell table:style-name="ce409" table:formula="of:=+IF([.$C63]&lt;&gt;&quot;&quot;;[.D6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3]+1)&gt;N;&quot;&quot;;([.B63]+1));&quot;&quot;)">
            <text:p/>
          </table:table-cell>
          <table:table-cell table:style-name="ce393" table:formula="of:=+IF([.$B64]&lt;&gt;&quot;&quot;;[.C63]-[.F64];&quot;&quot;)">
            <text:p/>
          </table:table-cell>
          <table:table-cell table:style-name="ce393" table:formula="of:=+IF([.$B64]&lt;&gt;&quot;&quot;;A;&quot;&quot;)">
            <text:p/>
          </table:table-cell>
          <table:table-cell table:style-name="ce393" table:formula="of:=+IF([.$B64]&lt;&gt;&quot;&quot;;[.C63]*[.$D$11];&quot;&quot;)">
            <text:p/>
          </table:table-cell>
          <table:table-cell table:style-name="ce393" table:formula="of:=+IF([.$B64]&lt;&gt;&quot;&quot;;[.D64]-[.E64];&quot;&quot;)">
            <text:p/>
          </table:table-cell>
          <table:table-cell table:style-name="ce409" table:formula="of:=+IF([.$C64]&lt;&gt;&quot;&quot;;[.D6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4]+1)&gt;N;&quot;&quot;;([.B64]+1));&quot;&quot;)">
            <text:p/>
          </table:table-cell>
          <table:table-cell table:style-name="ce393" table:formula="of:=+IF([.$B65]&lt;&gt;&quot;&quot;;[.C64]-[.F65];&quot;&quot;)">
            <text:p/>
          </table:table-cell>
          <table:table-cell table:style-name="ce393" table:formula="of:=+IF([.$B65]&lt;&gt;&quot;&quot;;A;&quot;&quot;)">
            <text:p/>
          </table:table-cell>
          <table:table-cell table:style-name="ce393" table:formula="of:=+IF([.$B65]&lt;&gt;&quot;&quot;;[.C64]*[.$D$11];&quot;&quot;)">
            <text:p/>
          </table:table-cell>
          <table:table-cell table:style-name="ce393" table:formula="of:=+IF([.$B65]&lt;&gt;&quot;&quot;;[.D65]-[.E65];&quot;&quot;)">
            <text:p/>
          </table:table-cell>
          <table:table-cell table:style-name="ce409" table:formula="of:=+IF([.$C65]&lt;&gt;&quot;&quot;;[.D6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5]+1)&gt;N;&quot;&quot;;([.B65]+1));&quot;&quot;)">
            <text:p/>
          </table:table-cell>
          <table:table-cell table:style-name="ce393" table:formula="of:=+IF([.$B66]&lt;&gt;&quot;&quot;;[.C65]-[.F66];&quot;&quot;)">
            <text:p/>
          </table:table-cell>
          <table:table-cell table:style-name="ce393" table:formula="of:=+IF([.$B66]&lt;&gt;&quot;&quot;;A;&quot;&quot;)">
            <text:p/>
          </table:table-cell>
          <table:table-cell table:style-name="ce393" table:formula="of:=+IF([.$B66]&lt;&gt;&quot;&quot;;[.C65]*[.$D$11];&quot;&quot;)">
            <text:p/>
          </table:table-cell>
          <table:table-cell table:style-name="ce393" table:formula="of:=+IF([.$B66]&lt;&gt;&quot;&quot;;[.D66]-[.E66];&quot;&quot;)">
            <text:p/>
          </table:table-cell>
          <table:table-cell table:style-name="ce409" table:formula="of:=+IF([.$C66]&lt;&gt;&quot;&quot;;[.D6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6]+1)&gt;N;&quot;&quot;;([.B66]+1));&quot;&quot;)">
            <text:p/>
          </table:table-cell>
          <table:table-cell table:style-name="ce393" table:formula="of:=+IF([.$B67]&lt;&gt;&quot;&quot;;[.C66]-[.F67];&quot;&quot;)">
            <text:p/>
          </table:table-cell>
          <table:table-cell table:style-name="ce393" table:formula="of:=+IF([.$B67]&lt;&gt;&quot;&quot;;A;&quot;&quot;)">
            <text:p/>
          </table:table-cell>
          <table:table-cell table:style-name="ce393" table:formula="of:=+IF([.$B67]&lt;&gt;&quot;&quot;;[.C66]*[.$D$11];&quot;&quot;)">
            <text:p/>
          </table:table-cell>
          <table:table-cell table:style-name="ce393" table:formula="of:=+IF([.$B67]&lt;&gt;&quot;&quot;;[.D67]-[.E67];&quot;&quot;)">
            <text:p/>
          </table:table-cell>
          <table:table-cell table:style-name="ce409" table:formula="of:=+IF([.$C67]&lt;&gt;&quot;&quot;;[.D6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7]+1)&gt;N;&quot;&quot;;([.B67]+1));&quot;&quot;)">
            <text:p/>
          </table:table-cell>
          <table:table-cell table:style-name="ce393" table:formula="of:=+IF([.$B68]&lt;&gt;&quot;&quot;;[.C67]-[.F68];&quot;&quot;)">
            <text:p/>
          </table:table-cell>
          <table:table-cell table:style-name="ce393" table:formula="of:=+IF([.$B68]&lt;&gt;&quot;&quot;;A;&quot;&quot;)">
            <text:p/>
          </table:table-cell>
          <table:table-cell table:style-name="ce393" table:formula="of:=+IF([.$B68]&lt;&gt;&quot;&quot;;[.C67]*[.$D$11];&quot;&quot;)">
            <text:p/>
          </table:table-cell>
          <table:table-cell table:style-name="ce393" table:formula="of:=+IF([.$B68]&lt;&gt;&quot;&quot;;[.D68]-[.E68];&quot;&quot;)">
            <text:p/>
          </table:table-cell>
          <table:table-cell table:style-name="ce409" table:formula="of:=+IF([.$C68]&lt;&gt;&quot;&quot;;[.D6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8]+1)&gt;N;&quot;&quot;;([.B68]+1));&quot;&quot;)">
            <text:p/>
          </table:table-cell>
          <table:table-cell table:style-name="ce393" table:formula="of:=+IF([.$B69]&lt;&gt;&quot;&quot;;[.C68]-[.F69];&quot;&quot;)">
            <text:p/>
          </table:table-cell>
          <table:table-cell table:style-name="ce393" table:formula="of:=+IF([.$B69]&lt;&gt;&quot;&quot;;A;&quot;&quot;)">
            <text:p/>
          </table:table-cell>
          <table:table-cell table:style-name="ce393" table:formula="of:=+IF([.$B69]&lt;&gt;&quot;&quot;;[.C68]*[.$D$11];&quot;&quot;)">
            <text:p/>
          </table:table-cell>
          <table:table-cell table:style-name="ce393" table:formula="of:=+IF([.$B69]&lt;&gt;&quot;&quot;;[.D69]-[.E69];&quot;&quot;)">
            <text:p/>
          </table:table-cell>
          <table:table-cell table:style-name="ce409" table:formula="of:=+IF([.$C69]&lt;&gt;&quot;&quot;;[.D6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69]+1)&gt;N;&quot;&quot;;([.B69]+1));&quot;&quot;)">
            <text:p/>
          </table:table-cell>
          <table:table-cell table:style-name="ce393" table:formula="of:=+IF([.$B70]&lt;&gt;&quot;&quot;;[.C69]-[.F70];&quot;&quot;)">
            <text:p/>
          </table:table-cell>
          <table:table-cell table:style-name="ce393" table:formula="of:=+IF([.$B70]&lt;&gt;&quot;&quot;;A;&quot;&quot;)">
            <text:p/>
          </table:table-cell>
          <table:table-cell table:style-name="ce393" table:formula="of:=+IF([.$B70]&lt;&gt;&quot;&quot;;[.C69]*[.$D$11];&quot;&quot;)">
            <text:p/>
          </table:table-cell>
          <table:table-cell table:style-name="ce393" table:formula="of:=+IF([.$B70]&lt;&gt;&quot;&quot;;[.D70]-[.E70];&quot;&quot;)">
            <text:p/>
          </table:table-cell>
          <table:table-cell table:style-name="ce409" table:formula="of:=+IF([.$C70]&lt;&gt;&quot;&quot;;[.D7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0]+1)&gt;N;&quot;&quot;;([.B70]+1));&quot;&quot;)">
            <text:p/>
          </table:table-cell>
          <table:table-cell table:style-name="ce393" table:formula="of:=+IF([.$B71]&lt;&gt;&quot;&quot;;[.C70]-[.F71];&quot;&quot;)">
            <text:p/>
          </table:table-cell>
          <table:table-cell table:style-name="ce393" table:formula="of:=+IF([.$B71]&lt;&gt;&quot;&quot;;A;&quot;&quot;)">
            <text:p/>
          </table:table-cell>
          <table:table-cell table:style-name="ce393" table:formula="of:=+IF([.$B71]&lt;&gt;&quot;&quot;;[.C70]*[.$D$11];&quot;&quot;)">
            <text:p/>
          </table:table-cell>
          <table:table-cell table:style-name="ce393" table:formula="of:=+IF([.$B71]&lt;&gt;&quot;&quot;;[.D71]-[.E71];&quot;&quot;)">
            <text:p/>
          </table:table-cell>
          <table:table-cell table:style-name="ce409" table:formula="of:=+IF([.$C71]&lt;&gt;&quot;&quot;;[.D7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1]+1)&gt;N;&quot;&quot;;([.B71]+1));&quot;&quot;)">
            <text:p/>
          </table:table-cell>
          <table:table-cell table:style-name="ce393" table:formula="of:=+IF([.$B72]&lt;&gt;&quot;&quot;;[.C71]-[.F72];&quot;&quot;)">
            <text:p/>
          </table:table-cell>
          <table:table-cell table:style-name="ce393" table:formula="of:=+IF([.$B72]&lt;&gt;&quot;&quot;;A;&quot;&quot;)">
            <text:p/>
          </table:table-cell>
          <table:table-cell table:style-name="ce393" table:formula="of:=+IF([.$B72]&lt;&gt;&quot;&quot;;[.C71]*[.$D$11];&quot;&quot;)">
            <text:p/>
          </table:table-cell>
          <table:table-cell table:style-name="ce393" table:formula="of:=+IF([.$B72]&lt;&gt;&quot;&quot;;[.D72]-[.E72];&quot;&quot;)">
            <text:p/>
          </table:table-cell>
          <table:table-cell table:style-name="ce409" table:formula="of:=+IF([.$C72]&lt;&gt;&quot;&quot;;[.D7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2]+1)&gt;N;&quot;&quot;;([.B72]+1));&quot;&quot;)">
            <text:p/>
          </table:table-cell>
          <table:table-cell table:style-name="ce393" table:formula="of:=+IF([.$B73]&lt;&gt;&quot;&quot;;[.C72]-[.F73];&quot;&quot;)">
            <text:p/>
          </table:table-cell>
          <table:table-cell table:style-name="ce393" table:formula="of:=+IF([.$B73]&lt;&gt;&quot;&quot;;A;&quot;&quot;)">
            <text:p/>
          </table:table-cell>
          <table:table-cell table:style-name="ce393" table:formula="of:=+IF([.$B73]&lt;&gt;&quot;&quot;;[.C72]*[.$D$11];&quot;&quot;)">
            <text:p/>
          </table:table-cell>
          <table:table-cell table:style-name="ce393" table:formula="of:=+IF([.$B73]&lt;&gt;&quot;&quot;;[.D73]-[.E73];&quot;&quot;)">
            <text:p/>
          </table:table-cell>
          <table:table-cell table:style-name="ce409" table:formula="of:=+IF([.$C73]&lt;&gt;&quot;&quot;;[.D7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3]+1)&gt;N;&quot;&quot;;([.B73]+1));&quot;&quot;)">
            <text:p/>
          </table:table-cell>
          <table:table-cell table:style-name="ce393" table:formula="of:=+IF([.$B74]&lt;&gt;&quot;&quot;;[.C73]-[.F74];&quot;&quot;)">
            <text:p/>
          </table:table-cell>
          <table:table-cell table:style-name="ce393" table:formula="of:=+IF([.$B74]&lt;&gt;&quot;&quot;;A;&quot;&quot;)">
            <text:p/>
          </table:table-cell>
          <table:table-cell table:style-name="ce393" table:formula="of:=+IF([.$B74]&lt;&gt;&quot;&quot;;[.C73]*[.$D$11];&quot;&quot;)">
            <text:p/>
          </table:table-cell>
          <table:table-cell table:style-name="ce393" table:formula="of:=+IF([.$B74]&lt;&gt;&quot;&quot;;[.D74]-[.E74];&quot;&quot;)">
            <text:p/>
          </table:table-cell>
          <table:table-cell table:style-name="ce409" table:formula="of:=+IF([.$C74]&lt;&gt;&quot;&quot;;[.D7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4]+1)&gt;N;&quot;&quot;;([.B74]+1));&quot;&quot;)">
            <text:p/>
          </table:table-cell>
          <table:table-cell table:style-name="ce393" table:formula="of:=+IF([.$B75]&lt;&gt;&quot;&quot;;[.C74]-[.F75];&quot;&quot;)">
            <text:p/>
          </table:table-cell>
          <table:table-cell table:style-name="ce393" table:formula="of:=+IF([.$B75]&lt;&gt;&quot;&quot;;A;&quot;&quot;)">
            <text:p/>
          </table:table-cell>
          <table:table-cell table:style-name="ce393" table:formula="of:=+IF([.$B75]&lt;&gt;&quot;&quot;;[.C74]*[.$D$11];&quot;&quot;)">
            <text:p/>
          </table:table-cell>
          <table:table-cell table:style-name="ce393" table:formula="of:=+IF([.$B75]&lt;&gt;&quot;&quot;;[.D75]-[.E75];&quot;&quot;)">
            <text:p/>
          </table:table-cell>
          <table:table-cell table:style-name="ce409" table:formula="of:=+IF([.$C75]&lt;&gt;&quot;&quot;;[.D7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5]+1)&gt;N;&quot;&quot;;([.B75]+1));&quot;&quot;)">
            <text:p/>
          </table:table-cell>
          <table:table-cell table:style-name="ce393" table:formula="of:=+IF([.$B76]&lt;&gt;&quot;&quot;;[.C75]-[.F76];&quot;&quot;)">
            <text:p/>
          </table:table-cell>
          <table:table-cell table:style-name="ce393" table:formula="of:=+IF([.$B76]&lt;&gt;&quot;&quot;;A;&quot;&quot;)">
            <text:p/>
          </table:table-cell>
          <table:table-cell table:style-name="ce393" table:formula="of:=+IF([.$B76]&lt;&gt;&quot;&quot;;[.C75]*[.$D$11];&quot;&quot;)">
            <text:p/>
          </table:table-cell>
          <table:table-cell table:style-name="ce393" table:formula="of:=+IF([.$B76]&lt;&gt;&quot;&quot;;[.D76]-[.E76];&quot;&quot;)">
            <text:p/>
          </table:table-cell>
          <table:table-cell table:style-name="ce409" table:formula="of:=+IF([.$C76]&lt;&gt;&quot;&quot;;[.D7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6]+1)&gt;N;&quot;&quot;;([.B76]+1));&quot;&quot;)">
            <text:p/>
          </table:table-cell>
          <table:table-cell table:style-name="ce393" table:formula="of:=+IF([.$B77]&lt;&gt;&quot;&quot;;[.C76]-[.F77];&quot;&quot;)">
            <text:p/>
          </table:table-cell>
          <table:table-cell table:style-name="ce393" table:formula="of:=+IF([.$B77]&lt;&gt;&quot;&quot;;A;&quot;&quot;)">
            <text:p/>
          </table:table-cell>
          <table:table-cell table:style-name="ce393" table:formula="of:=+IF([.$B77]&lt;&gt;&quot;&quot;;[.C76]*[.$D$11];&quot;&quot;)">
            <text:p/>
          </table:table-cell>
          <table:table-cell table:style-name="ce393" table:formula="of:=+IF([.$B77]&lt;&gt;&quot;&quot;;[.D77]-[.E77];&quot;&quot;)">
            <text:p/>
          </table:table-cell>
          <table:table-cell table:style-name="ce409" table:formula="of:=+IF([.$C77]&lt;&gt;&quot;&quot;;[.D7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7]+1)&gt;N;&quot;&quot;;([.B77]+1));&quot;&quot;)">
            <text:p/>
          </table:table-cell>
          <table:table-cell table:style-name="ce393" table:formula="of:=+IF([.$B78]&lt;&gt;&quot;&quot;;[.C77]-[.F78];&quot;&quot;)">
            <text:p/>
          </table:table-cell>
          <table:table-cell table:style-name="ce393" table:formula="of:=+IF([.$B78]&lt;&gt;&quot;&quot;;A;&quot;&quot;)">
            <text:p/>
          </table:table-cell>
          <table:table-cell table:style-name="ce393" table:formula="of:=+IF([.$B78]&lt;&gt;&quot;&quot;;[.C77]*[.$D$11];&quot;&quot;)">
            <text:p/>
          </table:table-cell>
          <table:table-cell table:style-name="ce393" table:formula="of:=+IF([.$B78]&lt;&gt;&quot;&quot;;[.D78]-[.E78];&quot;&quot;)">
            <text:p/>
          </table:table-cell>
          <table:table-cell table:style-name="ce409" table:formula="of:=+IF([.$C78]&lt;&gt;&quot;&quot;;[.D7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8]+1)&gt;N;&quot;&quot;;([.B78]+1));&quot;&quot;)">
            <text:p/>
          </table:table-cell>
          <table:table-cell table:style-name="ce393" table:formula="of:=+IF([.$B79]&lt;&gt;&quot;&quot;;[.C78]-[.F79];&quot;&quot;)">
            <text:p/>
          </table:table-cell>
          <table:table-cell table:style-name="ce393" table:formula="of:=+IF([.$B79]&lt;&gt;&quot;&quot;;A;&quot;&quot;)">
            <text:p/>
          </table:table-cell>
          <table:table-cell table:style-name="ce393" table:formula="of:=+IF([.$B79]&lt;&gt;&quot;&quot;;[.C78]*[.$D$11];&quot;&quot;)">
            <text:p/>
          </table:table-cell>
          <table:table-cell table:style-name="ce393" table:formula="of:=+IF([.$B79]&lt;&gt;&quot;&quot;;[.D79]-[.E79];&quot;&quot;)">
            <text:p/>
          </table:table-cell>
          <table:table-cell table:style-name="ce409" table:formula="of:=+IF([.$C79]&lt;&gt;&quot;&quot;;[.D7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79]+1)&gt;N;&quot;&quot;;([.B79]+1));&quot;&quot;)">
            <text:p/>
          </table:table-cell>
          <table:table-cell table:style-name="ce393" table:formula="of:=+IF([.$B80]&lt;&gt;&quot;&quot;;[.C79]-[.F80];&quot;&quot;)">
            <text:p/>
          </table:table-cell>
          <table:table-cell table:style-name="ce393" table:formula="of:=+IF([.$B80]&lt;&gt;&quot;&quot;;A;&quot;&quot;)">
            <text:p/>
          </table:table-cell>
          <table:table-cell table:style-name="ce393" table:formula="of:=+IF([.$B80]&lt;&gt;&quot;&quot;;[.C79]*[.$D$11];&quot;&quot;)">
            <text:p/>
          </table:table-cell>
          <table:table-cell table:style-name="ce393" table:formula="of:=+IF([.$B80]&lt;&gt;&quot;&quot;;[.D80]-[.E80];&quot;&quot;)">
            <text:p/>
          </table:table-cell>
          <table:table-cell table:style-name="ce409" table:formula="of:=+IF([.$C80]&lt;&gt;&quot;&quot;;[.D8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0]+1)&gt;N;&quot;&quot;;([.B80]+1));&quot;&quot;)">
            <text:p/>
          </table:table-cell>
          <table:table-cell table:style-name="ce393" table:formula="of:=+IF([.$B81]&lt;&gt;&quot;&quot;;[.C80]-[.F81];&quot;&quot;)">
            <text:p/>
          </table:table-cell>
          <table:table-cell table:style-name="ce393" table:formula="of:=+IF([.$B81]&lt;&gt;&quot;&quot;;A;&quot;&quot;)">
            <text:p/>
          </table:table-cell>
          <table:table-cell table:style-name="ce393" table:formula="of:=+IF([.$B81]&lt;&gt;&quot;&quot;;[.C80]*[.$D$11];&quot;&quot;)">
            <text:p/>
          </table:table-cell>
          <table:table-cell table:style-name="ce393" table:formula="of:=+IF([.$B81]&lt;&gt;&quot;&quot;;[.D81]-[.E81];&quot;&quot;)">
            <text:p/>
          </table:table-cell>
          <table:table-cell table:style-name="ce409" table:formula="of:=+IF([.$C81]&lt;&gt;&quot;&quot;;[.D8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1]+1)&gt;N;&quot;&quot;;([.B81]+1));&quot;&quot;)">
            <text:p/>
          </table:table-cell>
          <table:table-cell table:style-name="ce393" table:formula="of:=+IF([.$B82]&lt;&gt;&quot;&quot;;[.C81]-[.F82];&quot;&quot;)">
            <text:p/>
          </table:table-cell>
          <table:table-cell table:style-name="ce393" table:formula="of:=+IF([.$B82]&lt;&gt;&quot;&quot;;A;&quot;&quot;)">
            <text:p/>
          </table:table-cell>
          <table:table-cell table:style-name="ce393" table:formula="of:=+IF([.$B82]&lt;&gt;&quot;&quot;;[.C81]*[.$D$11];&quot;&quot;)">
            <text:p/>
          </table:table-cell>
          <table:table-cell table:style-name="ce393" table:formula="of:=+IF([.$B82]&lt;&gt;&quot;&quot;;[.D82]-[.E82];&quot;&quot;)">
            <text:p/>
          </table:table-cell>
          <table:table-cell table:style-name="ce409" table:formula="of:=+IF([.$C82]&lt;&gt;&quot;&quot;;[.D8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2]+1)&gt;N;&quot;&quot;;([.B82]+1));&quot;&quot;)">
            <text:p/>
          </table:table-cell>
          <table:table-cell table:style-name="ce393" table:formula="of:=+IF([.$B83]&lt;&gt;&quot;&quot;;[.C82]-[.F83];&quot;&quot;)">
            <text:p/>
          </table:table-cell>
          <table:table-cell table:style-name="ce393" table:formula="of:=+IF([.$B83]&lt;&gt;&quot;&quot;;A;&quot;&quot;)">
            <text:p/>
          </table:table-cell>
          <table:table-cell table:style-name="ce393" table:formula="of:=+IF([.$B83]&lt;&gt;&quot;&quot;;[.C82]*[.$D$11];&quot;&quot;)">
            <text:p/>
          </table:table-cell>
          <table:table-cell table:style-name="ce393" table:formula="of:=+IF([.$B83]&lt;&gt;&quot;&quot;;[.D83]-[.E83];&quot;&quot;)">
            <text:p/>
          </table:table-cell>
          <table:table-cell table:style-name="ce409" table:formula="of:=+IF([.$C83]&lt;&gt;&quot;&quot;;[.D8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3]+1)&gt;N;&quot;&quot;;([.B83]+1));&quot;&quot;)">
            <text:p/>
          </table:table-cell>
          <table:table-cell table:style-name="ce393" table:formula="of:=+IF([.$B84]&lt;&gt;&quot;&quot;;[.C83]-[.F84];&quot;&quot;)">
            <text:p/>
          </table:table-cell>
          <table:table-cell table:style-name="ce393" table:formula="of:=+IF([.$B84]&lt;&gt;&quot;&quot;;A;&quot;&quot;)">
            <text:p/>
          </table:table-cell>
          <table:table-cell table:style-name="ce393" table:formula="of:=+IF([.$B84]&lt;&gt;&quot;&quot;;[.C83]*[.$D$11];&quot;&quot;)">
            <text:p/>
          </table:table-cell>
          <table:table-cell table:style-name="ce393" table:formula="of:=+IF([.$B84]&lt;&gt;&quot;&quot;;[.D84]-[.E84];&quot;&quot;)">
            <text:p/>
          </table:table-cell>
          <table:table-cell table:style-name="ce409" table:formula="of:=+IF([.$C84]&lt;&gt;&quot;&quot;;[.D8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4]+1)&gt;N;&quot;&quot;;([.B84]+1));&quot;&quot;)">
            <text:p/>
          </table:table-cell>
          <table:table-cell table:style-name="ce393" table:formula="of:=+IF([.$B85]&lt;&gt;&quot;&quot;;[.C84]-[.F85];&quot;&quot;)">
            <text:p/>
          </table:table-cell>
          <table:table-cell table:style-name="ce393" table:formula="of:=+IF([.$B85]&lt;&gt;&quot;&quot;;A;&quot;&quot;)">
            <text:p/>
          </table:table-cell>
          <table:table-cell table:style-name="ce393" table:formula="of:=+IF([.$B85]&lt;&gt;&quot;&quot;;[.C84]*[.$D$11];&quot;&quot;)">
            <text:p/>
          </table:table-cell>
          <table:table-cell table:style-name="ce393" table:formula="of:=+IF([.$B85]&lt;&gt;&quot;&quot;;[.D85]-[.E85];&quot;&quot;)">
            <text:p/>
          </table:table-cell>
          <table:table-cell table:style-name="ce409" table:formula="of:=+IF([.$C85]&lt;&gt;&quot;&quot;;[.D8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5]+1)&gt;N;&quot;&quot;;([.B85]+1));&quot;&quot;)">
            <text:p/>
          </table:table-cell>
          <table:table-cell table:style-name="ce393" table:formula="of:=+IF([.$B86]&lt;&gt;&quot;&quot;;[.C85]-[.F86];&quot;&quot;)">
            <text:p/>
          </table:table-cell>
          <table:table-cell table:style-name="ce393" table:formula="of:=+IF([.$B86]&lt;&gt;&quot;&quot;;A;&quot;&quot;)">
            <text:p/>
          </table:table-cell>
          <table:table-cell table:style-name="ce393" table:formula="of:=+IF([.$B86]&lt;&gt;&quot;&quot;;[.C85]*[.$D$11];&quot;&quot;)">
            <text:p/>
          </table:table-cell>
          <table:table-cell table:style-name="ce393" table:formula="of:=+IF([.$B86]&lt;&gt;&quot;&quot;;[.D86]-[.E86];&quot;&quot;)">
            <text:p/>
          </table:table-cell>
          <table:table-cell table:style-name="ce409" table:formula="of:=+IF([.$C86]&lt;&gt;&quot;&quot;;[.D8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6]+1)&gt;N;&quot;&quot;;([.B86]+1));&quot;&quot;)">
            <text:p/>
          </table:table-cell>
          <table:table-cell table:style-name="ce393" table:formula="of:=+IF([.$B87]&lt;&gt;&quot;&quot;;[.C86]-[.F87];&quot;&quot;)">
            <text:p/>
          </table:table-cell>
          <table:table-cell table:style-name="ce393" table:formula="of:=+IF([.$B87]&lt;&gt;&quot;&quot;;A;&quot;&quot;)">
            <text:p/>
          </table:table-cell>
          <table:table-cell table:style-name="ce393" table:formula="of:=+IF([.$B87]&lt;&gt;&quot;&quot;;[.C86]*[.$D$11];&quot;&quot;)">
            <text:p/>
          </table:table-cell>
          <table:table-cell table:style-name="ce393" table:formula="of:=+IF([.$B87]&lt;&gt;&quot;&quot;;[.D87]-[.E87];&quot;&quot;)">
            <text:p/>
          </table:table-cell>
          <table:table-cell table:style-name="ce409" table:formula="of:=+IF([.$C87]&lt;&gt;&quot;&quot;;[.D8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7]+1)&gt;N;&quot;&quot;;([.B87]+1));&quot;&quot;)">
            <text:p/>
          </table:table-cell>
          <table:table-cell table:style-name="ce393" table:formula="of:=+IF([.$B88]&lt;&gt;&quot;&quot;;[.C87]-[.F88];&quot;&quot;)">
            <text:p/>
          </table:table-cell>
          <table:table-cell table:style-name="ce393" table:formula="of:=+IF([.$B88]&lt;&gt;&quot;&quot;;A;&quot;&quot;)">
            <text:p/>
          </table:table-cell>
          <table:table-cell table:style-name="ce393" table:formula="of:=+IF([.$B88]&lt;&gt;&quot;&quot;;[.C87]*[.$D$11];&quot;&quot;)">
            <text:p/>
          </table:table-cell>
          <table:table-cell table:style-name="ce393" table:formula="of:=+IF([.$B88]&lt;&gt;&quot;&quot;;[.D88]-[.E88];&quot;&quot;)">
            <text:p/>
          </table:table-cell>
          <table:table-cell table:style-name="ce409" table:formula="of:=+IF([.$C88]&lt;&gt;&quot;&quot;;[.D8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8]+1)&gt;N;&quot;&quot;;([.B88]+1));&quot;&quot;)">
            <text:p/>
          </table:table-cell>
          <table:table-cell table:style-name="ce393" table:formula="of:=+IF([.$B89]&lt;&gt;&quot;&quot;;[.C88]-[.F89];&quot;&quot;)">
            <text:p/>
          </table:table-cell>
          <table:table-cell table:style-name="ce393" table:formula="of:=+IF([.$B89]&lt;&gt;&quot;&quot;;A;&quot;&quot;)">
            <text:p/>
          </table:table-cell>
          <table:table-cell table:style-name="ce393" table:formula="of:=+IF([.$B89]&lt;&gt;&quot;&quot;;[.C88]*[.$D$11];&quot;&quot;)">
            <text:p/>
          </table:table-cell>
          <table:table-cell table:style-name="ce393" table:formula="of:=+IF([.$B89]&lt;&gt;&quot;&quot;;[.D89]-[.E89];&quot;&quot;)">
            <text:p/>
          </table:table-cell>
          <table:table-cell table:style-name="ce409" table:formula="of:=+IF([.$C89]&lt;&gt;&quot;&quot;;[.D8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89]+1)&gt;N;&quot;&quot;;([.B89]+1));&quot;&quot;)">
            <text:p/>
          </table:table-cell>
          <table:table-cell table:style-name="ce393" table:formula="of:=+IF([.$B90]&lt;&gt;&quot;&quot;;[.C89]-[.F90];&quot;&quot;)">
            <text:p/>
          </table:table-cell>
          <table:table-cell table:style-name="ce393" table:formula="of:=+IF([.$B90]&lt;&gt;&quot;&quot;;A;&quot;&quot;)">
            <text:p/>
          </table:table-cell>
          <table:table-cell table:style-name="ce393" table:formula="of:=+IF([.$B90]&lt;&gt;&quot;&quot;;[.C89]*[.$D$11];&quot;&quot;)">
            <text:p/>
          </table:table-cell>
          <table:table-cell table:style-name="ce393" table:formula="of:=+IF([.$B90]&lt;&gt;&quot;&quot;;[.D90]-[.E90];&quot;&quot;)">
            <text:p/>
          </table:table-cell>
          <table:table-cell table:style-name="ce409" table:formula="of:=+IF([.$C90]&lt;&gt;&quot;&quot;;[.D9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0]+1)&gt;N;&quot;&quot;;([.B90]+1));&quot;&quot;)">
            <text:p/>
          </table:table-cell>
          <table:table-cell table:style-name="ce393" table:formula="of:=+IF([.$B91]&lt;&gt;&quot;&quot;;[.C90]-[.F91];&quot;&quot;)">
            <text:p/>
          </table:table-cell>
          <table:table-cell table:style-name="ce393" table:formula="of:=+IF([.$B91]&lt;&gt;&quot;&quot;;A;&quot;&quot;)">
            <text:p/>
          </table:table-cell>
          <table:table-cell table:style-name="ce393" table:formula="of:=+IF([.$B91]&lt;&gt;&quot;&quot;;[.C90]*[.$D$11];&quot;&quot;)">
            <text:p/>
          </table:table-cell>
          <table:table-cell table:style-name="ce393" table:formula="of:=+IF([.$B91]&lt;&gt;&quot;&quot;;[.D91]-[.E91];&quot;&quot;)">
            <text:p/>
          </table:table-cell>
          <table:table-cell table:style-name="ce409" table:formula="of:=+IF([.$C91]&lt;&gt;&quot;&quot;;[.D9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1]+1)&gt;N;&quot;&quot;;([.B91]+1));&quot;&quot;)">
            <text:p/>
          </table:table-cell>
          <table:table-cell table:style-name="ce393" table:formula="of:=+IF([.$B92]&lt;&gt;&quot;&quot;;[.C91]-[.F92];&quot;&quot;)">
            <text:p/>
          </table:table-cell>
          <table:table-cell table:style-name="ce393" table:formula="of:=+IF([.$B92]&lt;&gt;&quot;&quot;;A;&quot;&quot;)">
            <text:p/>
          </table:table-cell>
          <table:table-cell table:style-name="ce393" table:formula="of:=+IF([.$B92]&lt;&gt;&quot;&quot;;[.C91]*[.$D$11];&quot;&quot;)">
            <text:p/>
          </table:table-cell>
          <table:table-cell table:style-name="ce393" table:formula="of:=+IF([.$B92]&lt;&gt;&quot;&quot;;[.D92]-[.E92];&quot;&quot;)">
            <text:p/>
          </table:table-cell>
          <table:table-cell table:style-name="ce409" table:formula="of:=+IF([.$C92]&lt;&gt;&quot;&quot;;[.D9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2]+1)&gt;N;&quot;&quot;;([.B92]+1));&quot;&quot;)">
            <text:p/>
          </table:table-cell>
          <table:table-cell table:style-name="ce393" table:formula="of:=+IF([.$B93]&lt;&gt;&quot;&quot;;[.C92]-[.F93];&quot;&quot;)">
            <text:p/>
          </table:table-cell>
          <table:table-cell table:style-name="ce393" table:formula="of:=+IF([.$B93]&lt;&gt;&quot;&quot;;A;&quot;&quot;)">
            <text:p/>
          </table:table-cell>
          <table:table-cell table:style-name="ce393" table:formula="of:=+IF([.$B93]&lt;&gt;&quot;&quot;;[.C92]*[.$D$11];&quot;&quot;)">
            <text:p/>
          </table:table-cell>
          <table:table-cell table:style-name="ce393" table:formula="of:=+IF([.$B93]&lt;&gt;&quot;&quot;;[.D93]-[.E93];&quot;&quot;)">
            <text:p/>
          </table:table-cell>
          <table:table-cell table:style-name="ce409" table:formula="of:=+IF([.$C93]&lt;&gt;&quot;&quot;;[.D9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3]+1)&gt;N;&quot;&quot;;([.B93]+1));&quot;&quot;)">
            <text:p/>
          </table:table-cell>
          <table:table-cell table:style-name="ce393" table:formula="of:=+IF([.$B94]&lt;&gt;&quot;&quot;;[.C93]-[.F94];&quot;&quot;)">
            <text:p/>
          </table:table-cell>
          <table:table-cell table:style-name="ce393" table:formula="of:=+IF([.$B94]&lt;&gt;&quot;&quot;;A;&quot;&quot;)">
            <text:p/>
          </table:table-cell>
          <table:table-cell table:style-name="ce393" table:formula="of:=+IF([.$B94]&lt;&gt;&quot;&quot;;[.C93]*[.$D$11];&quot;&quot;)">
            <text:p/>
          </table:table-cell>
          <table:table-cell table:style-name="ce393" table:formula="of:=+IF([.$B94]&lt;&gt;&quot;&quot;;[.D94]-[.E94];&quot;&quot;)">
            <text:p/>
          </table:table-cell>
          <table:table-cell table:style-name="ce409" table:formula="of:=+IF([.$C94]&lt;&gt;&quot;&quot;;[.D9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4]+1)&gt;N;&quot;&quot;;([.B94]+1));&quot;&quot;)">
            <text:p/>
          </table:table-cell>
          <table:table-cell table:style-name="ce393" table:formula="of:=+IF([.$B95]&lt;&gt;&quot;&quot;;[.C94]-[.F95];&quot;&quot;)">
            <text:p/>
          </table:table-cell>
          <table:table-cell table:style-name="ce393" table:formula="of:=+IF([.$B95]&lt;&gt;&quot;&quot;;A;&quot;&quot;)">
            <text:p/>
          </table:table-cell>
          <table:table-cell table:style-name="ce393" table:formula="of:=+IF([.$B95]&lt;&gt;&quot;&quot;;[.C94]*[.$D$11];&quot;&quot;)">
            <text:p/>
          </table:table-cell>
          <table:table-cell table:style-name="ce393" table:formula="of:=+IF([.$B95]&lt;&gt;&quot;&quot;;[.D95]-[.E95];&quot;&quot;)">
            <text:p/>
          </table:table-cell>
          <table:table-cell table:style-name="ce409" table:formula="of:=+IF([.$C95]&lt;&gt;&quot;&quot;;[.D9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5]+1)&gt;N;&quot;&quot;;([.B95]+1));&quot;&quot;)">
            <text:p/>
          </table:table-cell>
          <table:table-cell table:style-name="ce393" table:formula="of:=+IF([.$B96]&lt;&gt;&quot;&quot;;[.C95]-[.F96];&quot;&quot;)">
            <text:p/>
          </table:table-cell>
          <table:table-cell table:style-name="ce393" table:formula="of:=+IF([.$B96]&lt;&gt;&quot;&quot;;A;&quot;&quot;)">
            <text:p/>
          </table:table-cell>
          <table:table-cell table:style-name="ce393" table:formula="of:=+IF([.$B96]&lt;&gt;&quot;&quot;;[.C95]*[.$D$11];&quot;&quot;)">
            <text:p/>
          </table:table-cell>
          <table:table-cell table:style-name="ce393" table:formula="of:=+IF([.$B96]&lt;&gt;&quot;&quot;;[.D96]-[.E96];&quot;&quot;)">
            <text:p/>
          </table:table-cell>
          <table:table-cell table:style-name="ce409" table:formula="of:=+IF([.$C96]&lt;&gt;&quot;&quot;;[.D9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6]+1)&gt;N;&quot;&quot;;([.B96]+1));&quot;&quot;)">
            <text:p/>
          </table:table-cell>
          <table:table-cell table:style-name="ce393" table:formula="of:=+IF([.$B97]&lt;&gt;&quot;&quot;;[.C96]-[.F97];&quot;&quot;)">
            <text:p/>
          </table:table-cell>
          <table:table-cell table:style-name="ce393" table:formula="of:=+IF([.$B97]&lt;&gt;&quot;&quot;;A;&quot;&quot;)">
            <text:p/>
          </table:table-cell>
          <table:table-cell table:style-name="ce393" table:formula="of:=+IF([.$B97]&lt;&gt;&quot;&quot;;[.C96]*[.$D$11];&quot;&quot;)">
            <text:p/>
          </table:table-cell>
          <table:table-cell table:style-name="ce393" table:formula="of:=+IF([.$B97]&lt;&gt;&quot;&quot;;[.D97]-[.E97];&quot;&quot;)">
            <text:p/>
          </table:table-cell>
          <table:table-cell table:style-name="ce409" table:formula="of:=+IF([.$C97]&lt;&gt;&quot;&quot;;[.D9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7]+1)&gt;N;&quot;&quot;;([.B97]+1));&quot;&quot;)">
            <text:p/>
          </table:table-cell>
          <table:table-cell table:style-name="ce393" table:formula="of:=+IF([.$B98]&lt;&gt;&quot;&quot;;[.C97]-[.F98];&quot;&quot;)">
            <text:p/>
          </table:table-cell>
          <table:table-cell table:style-name="ce393" table:formula="of:=+IF([.$B98]&lt;&gt;&quot;&quot;;A;&quot;&quot;)">
            <text:p/>
          </table:table-cell>
          <table:table-cell table:style-name="ce393" table:formula="of:=+IF([.$B98]&lt;&gt;&quot;&quot;;[.C97]*[.$D$11];&quot;&quot;)">
            <text:p/>
          </table:table-cell>
          <table:table-cell table:style-name="ce393" table:formula="of:=+IF([.$B98]&lt;&gt;&quot;&quot;;[.D98]-[.E98];&quot;&quot;)">
            <text:p/>
          </table:table-cell>
          <table:table-cell table:style-name="ce409" table:formula="of:=+IF([.$C98]&lt;&gt;&quot;&quot;;[.D9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8]+1)&gt;N;&quot;&quot;;([.B98]+1));&quot;&quot;)">
            <text:p/>
          </table:table-cell>
          <table:table-cell table:style-name="ce393" table:formula="of:=+IF([.$B99]&lt;&gt;&quot;&quot;;[.C98]-[.F99];&quot;&quot;)">
            <text:p/>
          </table:table-cell>
          <table:table-cell table:style-name="ce393" table:formula="of:=+IF([.$B99]&lt;&gt;&quot;&quot;;A;&quot;&quot;)">
            <text:p/>
          </table:table-cell>
          <table:table-cell table:style-name="ce393" table:formula="of:=+IF([.$B99]&lt;&gt;&quot;&quot;;[.C98]*[.$D$11];&quot;&quot;)">
            <text:p/>
          </table:table-cell>
          <table:table-cell table:style-name="ce393" table:formula="of:=+IF([.$B99]&lt;&gt;&quot;&quot;;[.D99]-[.E99];&quot;&quot;)">
            <text:p/>
          </table:table-cell>
          <table:table-cell table:style-name="ce409" table:formula="of:=+IF([.$C99]&lt;&gt;&quot;&quot;;[.D9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99]+1)&gt;N;&quot;&quot;;([.B99]+1));&quot;&quot;)">
            <text:p/>
          </table:table-cell>
          <table:table-cell table:style-name="ce393" table:formula="of:=+IF([.$B100]&lt;&gt;&quot;&quot;;[.C99]-[.F100];&quot;&quot;)">
            <text:p/>
          </table:table-cell>
          <table:table-cell table:style-name="ce393" table:formula="of:=+IF([.$B100]&lt;&gt;&quot;&quot;;A;&quot;&quot;)">
            <text:p/>
          </table:table-cell>
          <table:table-cell table:style-name="ce393" table:formula="of:=+IF([.$B100]&lt;&gt;&quot;&quot;;[.C99]*[.$D$11];&quot;&quot;)">
            <text:p/>
          </table:table-cell>
          <table:table-cell table:style-name="ce393" table:formula="of:=+IF([.$B100]&lt;&gt;&quot;&quot;;[.D100]-[.E100];&quot;&quot;)">
            <text:p/>
          </table:table-cell>
          <table:table-cell table:style-name="ce409" table:formula="of:=+IF([.$C100]&lt;&gt;&quot;&quot;;[.D10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0]+1)&gt;N;&quot;&quot;;([.B100]+1));&quot;&quot;)">
            <text:p/>
          </table:table-cell>
          <table:table-cell table:style-name="ce393" table:formula="of:=+IF([.$B101]&lt;&gt;&quot;&quot;;[.C100]-[.F101];&quot;&quot;)">
            <text:p/>
          </table:table-cell>
          <table:table-cell table:style-name="ce393" table:formula="of:=+IF([.$B101]&lt;&gt;&quot;&quot;;A;&quot;&quot;)">
            <text:p/>
          </table:table-cell>
          <table:table-cell table:style-name="ce393" table:formula="of:=+IF([.$B101]&lt;&gt;&quot;&quot;;[.C100]*[.$D$11];&quot;&quot;)">
            <text:p/>
          </table:table-cell>
          <table:table-cell table:style-name="ce393" table:formula="of:=+IF([.$B101]&lt;&gt;&quot;&quot;;[.D101]-[.E101];&quot;&quot;)">
            <text:p/>
          </table:table-cell>
          <table:table-cell table:style-name="ce409" table:formula="of:=+IF([.$C101]&lt;&gt;&quot;&quot;;[.D10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1]+1)&gt;N;&quot;&quot;;([.B101]+1));&quot;&quot;)">
            <text:p/>
          </table:table-cell>
          <table:table-cell table:style-name="ce393" table:formula="of:=+IF([.$B102]&lt;&gt;&quot;&quot;;[.C101]-[.F102];&quot;&quot;)">
            <text:p/>
          </table:table-cell>
          <table:table-cell table:style-name="ce393" table:formula="of:=+IF([.$B102]&lt;&gt;&quot;&quot;;A;&quot;&quot;)">
            <text:p/>
          </table:table-cell>
          <table:table-cell table:style-name="ce393" table:formula="of:=+IF([.$B102]&lt;&gt;&quot;&quot;;[.C101]*[.$D$11];&quot;&quot;)">
            <text:p/>
          </table:table-cell>
          <table:table-cell table:style-name="ce393" table:formula="of:=+IF([.$B102]&lt;&gt;&quot;&quot;;[.D102]-[.E102];&quot;&quot;)">
            <text:p/>
          </table:table-cell>
          <table:table-cell table:style-name="ce409" table:formula="of:=+IF([.$C102]&lt;&gt;&quot;&quot;;[.D10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2]+1)&gt;N;&quot;&quot;;([.B102]+1));&quot;&quot;)">
            <text:p/>
          </table:table-cell>
          <table:table-cell table:style-name="ce393" table:formula="of:=+IF([.$B103]&lt;&gt;&quot;&quot;;[.C102]-[.F103];&quot;&quot;)">
            <text:p/>
          </table:table-cell>
          <table:table-cell table:style-name="ce393" table:formula="of:=+IF([.$B103]&lt;&gt;&quot;&quot;;A;&quot;&quot;)">
            <text:p/>
          </table:table-cell>
          <table:table-cell table:style-name="ce393" table:formula="of:=+IF([.$B103]&lt;&gt;&quot;&quot;;[.C102]*[.$D$11];&quot;&quot;)">
            <text:p/>
          </table:table-cell>
          <table:table-cell table:style-name="ce393" table:formula="of:=+IF([.$B103]&lt;&gt;&quot;&quot;;[.D103]-[.E103];&quot;&quot;)">
            <text:p/>
          </table:table-cell>
          <table:table-cell table:style-name="ce409" table:formula="of:=+IF([.$C103]&lt;&gt;&quot;&quot;;[.D10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3]+1)&gt;N;&quot;&quot;;([.B103]+1));&quot;&quot;)">
            <text:p/>
          </table:table-cell>
          <table:table-cell table:style-name="ce393" table:formula="of:=+IF([.$B104]&lt;&gt;&quot;&quot;;[.C103]-[.F104];&quot;&quot;)">
            <text:p/>
          </table:table-cell>
          <table:table-cell table:style-name="ce393" table:formula="of:=+IF([.$B104]&lt;&gt;&quot;&quot;;A;&quot;&quot;)">
            <text:p/>
          </table:table-cell>
          <table:table-cell table:style-name="ce393" table:formula="of:=+IF([.$B104]&lt;&gt;&quot;&quot;;[.C103]*[.$D$11];&quot;&quot;)">
            <text:p/>
          </table:table-cell>
          <table:table-cell table:style-name="ce393" table:formula="of:=+IF([.$B104]&lt;&gt;&quot;&quot;;[.D104]-[.E104];&quot;&quot;)">
            <text:p/>
          </table:table-cell>
          <table:table-cell table:style-name="ce409" table:formula="of:=+IF([.$C104]&lt;&gt;&quot;&quot;;[.D10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4]+1)&gt;N;&quot;&quot;;([.B104]+1));&quot;&quot;)">
            <text:p/>
          </table:table-cell>
          <table:table-cell table:style-name="ce393" table:formula="of:=+IF([.$B105]&lt;&gt;&quot;&quot;;[.C104]-[.F105];&quot;&quot;)">
            <text:p/>
          </table:table-cell>
          <table:table-cell table:style-name="ce393" table:formula="of:=+IF([.$B105]&lt;&gt;&quot;&quot;;A;&quot;&quot;)">
            <text:p/>
          </table:table-cell>
          <table:table-cell table:style-name="ce393" table:formula="of:=+IF([.$B105]&lt;&gt;&quot;&quot;;[.C104]*[.$D$11];&quot;&quot;)">
            <text:p/>
          </table:table-cell>
          <table:table-cell table:style-name="ce393" table:formula="of:=+IF([.$B105]&lt;&gt;&quot;&quot;;[.D105]-[.E105];&quot;&quot;)">
            <text:p/>
          </table:table-cell>
          <table:table-cell table:style-name="ce409" table:formula="of:=+IF([.$C105]&lt;&gt;&quot;&quot;;[.D10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5]+1)&gt;N;&quot;&quot;;([.B105]+1));&quot;&quot;)">
            <text:p/>
          </table:table-cell>
          <table:table-cell table:style-name="ce393" table:formula="of:=+IF([.$B106]&lt;&gt;&quot;&quot;;[.C105]-[.F106];&quot;&quot;)">
            <text:p/>
          </table:table-cell>
          <table:table-cell table:style-name="ce393" table:formula="of:=+IF([.$B106]&lt;&gt;&quot;&quot;;A;&quot;&quot;)">
            <text:p/>
          </table:table-cell>
          <table:table-cell table:style-name="ce393" table:formula="of:=+IF([.$B106]&lt;&gt;&quot;&quot;;[.C105]*[.$D$11];&quot;&quot;)">
            <text:p/>
          </table:table-cell>
          <table:table-cell table:style-name="ce393" table:formula="of:=+IF([.$B106]&lt;&gt;&quot;&quot;;[.D106]-[.E106];&quot;&quot;)">
            <text:p/>
          </table:table-cell>
          <table:table-cell table:style-name="ce409" table:formula="of:=+IF([.$C106]&lt;&gt;&quot;&quot;;[.D10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6]+1)&gt;N;&quot;&quot;;([.B106]+1));&quot;&quot;)">
            <text:p/>
          </table:table-cell>
          <table:table-cell table:style-name="ce393" table:formula="of:=+IF([.$B107]&lt;&gt;&quot;&quot;;[.C106]-[.F107];&quot;&quot;)">
            <text:p/>
          </table:table-cell>
          <table:table-cell table:style-name="ce393" table:formula="of:=+IF([.$B107]&lt;&gt;&quot;&quot;;A;&quot;&quot;)">
            <text:p/>
          </table:table-cell>
          <table:table-cell table:style-name="ce393" table:formula="of:=+IF([.$B107]&lt;&gt;&quot;&quot;;[.C106]*[.$D$11];&quot;&quot;)">
            <text:p/>
          </table:table-cell>
          <table:table-cell table:style-name="ce393" table:formula="of:=+IF([.$B107]&lt;&gt;&quot;&quot;;[.D107]-[.E107];&quot;&quot;)">
            <text:p/>
          </table:table-cell>
          <table:table-cell table:style-name="ce409" table:formula="of:=+IF([.$C107]&lt;&gt;&quot;&quot;;[.D10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7]+1)&gt;N;&quot;&quot;;([.B107]+1));&quot;&quot;)">
            <text:p/>
          </table:table-cell>
          <table:table-cell table:style-name="ce393" table:formula="of:=+IF([.$B108]&lt;&gt;&quot;&quot;;[.C107]-[.F108];&quot;&quot;)">
            <text:p/>
          </table:table-cell>
          <table:table-cell table:style-name="ce393" table:formula="of:=+IF([.$B108]&lt;&gt;&quot;&quot;;A;&quot;&quot;)">
            <text:p/>
          </table:table-cell>
          <table:table-cell table:style-name="ce393" table:formula="of:=+IF([.$B108]&lt;&gt;&quot;&quot;;[.C107]*[.$D$11];&quot;&quot;)">
            <text:p/>
          </table:table-cell>
          <table:table-cell table:style-name="ce393" table:formula="of:=+IF([.$B108]&lt;&gt;&quot;&quot;;[.D108]-[.E108];&quot;&quot;)">
            <text:p/>
          </table:table-cell>
          <table:table-cell table:style-name="ce409" table:formula="of:=+IF([.$C108]&lt;&gt;&quot;&quot;;[.D10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8]+1)&gt;N;&quot;&quot;;([.B108]+1));&quot;&quot;)">
            <text:p/>
          </table:table-cell>
          <table:table-cell table:style-name="ce393" table:formula="of:=+IF([.$B109]&lt;&gt;&quot;&quot;;[.C108]-[.F109];&quot;&quot;)">
            <text:p/>
          </table:table-cell>
          <table:table-cell table:style-name="ce393" table:formula="of:=+IF([.$B109]&lt;&gt;&quot;&quot;;A;&quot;&quot;)">
            <text:p/>
          </table:table-cell>
          <table:table-cell table:style-name="ce393" table:formula="of:=+IF([.$B109]&lt;&gt;&quot;&quot;;[.C108]*[.$D$11];&quot;&quot;)">
            <text:p/>
          </table:table-cell>
          <table:table-cell table:style-name="ce393" table:formula="of:=+IF([.$B109]&lt;&gt;&quot;&quot;;[.D109]-[.E109];&quot;&quot;)">
            <text:p/>
          </table:table-cell>
          <table:table-cell table:style-name="ce409" table:formula="of:=+IF([.$C109]&lt;&gt;&quot;&quot;;[.D10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09]+1)&gt;N;&quot;&quot;;([.B109]+1));&quot;&quot;)">
            <text:p/>
          </table:table-cell>
          <table:table-cell table:style-name="ce393" table:formula="of:=+IF([.$B110]&lt;&gt;&quot;&quot;;[.C109]-[.F110];&quot;&quot;)">
            <text:p/>
          </table:table-cell>
          <table:table-cell table:style-name="ce393" table:formula="of:=+IF([.$B110]&lt;&gt;&quot;&quot;;A;&quot;&quot;)">
            <text:p/>
          </table:table-cell>
          <table:table-cell table:style-name="ce393" table:formula="of:=+IF([.$B110]&lt;&gt;&quot;&quot;;[.C109]*[.$D$11];&quot;&quot;)">
            <text:p/>
          </table:table-cell>
          <table:table-cell table:style-name="ce393" table:formula="of:=+IF([.$B110]&lt;&gt;&quot;&quot;;[.D110]-[.E110];&quot;&quot;)">
            <text:p/>
          </table:table-cell>
          <table:table-cell table:style-name="ce409" table:formula="of:=+IF([.$C110]&lt;&gt;&quot;&quot;;[.D11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0]+1)&gt;N;&quot;&quot;;([.B110]+1));&quot;&quot;)">
            <text:p/>
          </table:table-cell>
          <table:table-cell table:style-name="ce393" table:formula="of:=+IF([.$B111]&lt;&gt;&quot;&quot;;[.C110]-[.F111];&quot;&quot;)">
            <text:p/>
          </table:table-cell>
          <table:table-cell table:style-name="ce393" table:formula="of:=+IF([.$B111]&lt;&gt;&quot;&quot;;A;&quot;&quot;)">
            <text:p/>
          </table:table-cell>
          <table:table-cell table:style-name="ce393" table:formula="of:=+IF([.$B111]&lt;&gt;&quot;&quot;;[.C110]*[.$D$11];&quot;&quot;)">
            <text:p/>
          </table:table-cell>
          <table:table-cell table:style-name="ce393" table:formula="of:=+IF([.$B111]&lt;&gt;&quot;&quot;;[.D111]-[.E111];&quot;&quot;)">
            <text:p/>
          </table:table-cell>
          <table:table-cell table:style-name="ce409" table:formula="of:=+IF([.$C111]&lt;&gt;&quot;&quot;;[.D11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1]+1)&gt;N;&quot;&quot;;([.B111]+1));&quot;&quot;)">
            <text:p/>
          </table:table-cell>
          <table:table-cell table:style-name="ce393" table:formula="of:=+IF([.$B112]&lt;&gt;&quot;&quot;;[.C111]-[.F112];&quot;&quot;)">
            <text:p/>
          </table:table-cell>
          <table:table-cell table:style-name="ce393" table:formula="of:=+IF([.$B112]&lt;&gt;&quot;&quot;;A;&quot;&quot;)">
            <text:p/>
          </table:table-cell>
          <table:table-cell table:style-name="ce393" table:formula="of:=+IF([.$B112]&lt;&gt;&quot;&quot;;[.C111]*[.$D$11];&quot;&quot;)">
            <text:p/>
          </table:table-cell>
          <table:table-cell table:style-name="ce393" table:formula="of:=+IF([.$B112]&lt;&gt;&quot;&quot;;[.D112]-[.E112];&quot;&quot;)">
            <text:p/>
          </table:table-cell>
          <table:table-cell table:style-name="ce409" table:formula="of:=+IF([.$C112]&lt;&gt;&quot;&quot;;[.D11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2]+1)&gt;N;&quot;&quot;;([.B112]+1));&quot;&quot;)">
            <text:p/>
          </table:table-cell>
          <table:table-cell table:style-name="ce393" table:formula="of:=+IF([.$B113]&lt;&gt;&quot;&quot;;[.C112]-[.F113];&quot;&quot;)">
            <text:p/>
          </table:table-cell>
          <table:table-cell table:style-name="ce393" table:formula="of:=+IF([.$B113]&lt;&gt;&quot;&quot;;A;&quot;&quot;)">
            <text:p/>
          </table:table-cell>
          <table:table-cell table:style-name="ce393" table:formula="of:=+IF([.$B113]&lt;&gt;&quot;&quot;;[.C112]*[.$D$11];&quot;&quot;)">
            <text:p/>
          </table:table-cell>
          <table:table-cell table:style-name="ce393" table:formula="of:=+IF([.$B113]&lt;&gt;&quot;&quot;;[.D113]-[.E113];&quot;&quot;)">
            <text:p/>
          </table:table-cell>
          <table:table-cell table:style-name="ce409" table:formula="of:=+IF([.$C113]&lt;&gt;&quot;&quot;;[.D11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3]+1)&gt;N;&quot;&quot;;([.B113]+1));&quot;&quot;)">
            <text:p/>
          </table:table-cell>
          <table:table-cell table:style-name="ce393" table:formula="of:=+IF([.$B114]&lt;&gt;&quot;&quot;;[.C113]-[.F114];&quot;&quot;)">
            <text:p/>
          </table:table-cell>
          <table:table-cell table:style-name="ce393" table:formula="of:=+IF([.$B114]&lt;&gt;&quot;&quot;;A;&quot;&quot;)">
            <text:p/>
          </table:table-cell>
          <table:table-cell table:style-name="ce393" table:formula="of:=+IF([.$B114]&lt;&gt;&quot;&quot;;[.C113]*[.$D$11];&quot;&quot;)">
            <text:p/>
          </table:table-cell>
          <table:table-cell table:style-name="ce393" table:formula="of:=+IF([.$B114]&lt;&gt;&quot;&quot;;[.D114]-[.E114];&quot;&quot;)">
            <text:p/>
          </table:table-cell>
          <table:table-cell table:style-name="ce409" table:formula="of:=+IF([.$C114]&lt;&gt;&quot;&quot;;[.D11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4]+1)&gt;N;&quot;&quot;;([.B114]+1));&quot;&quot;)">
            <text:p/>
          </table:table-cell>
          <table:table-cell table:style-name="ce393" table:formula="of:=+IF([.$B115]&lt;&gt;&quot;&quot;;[.C114]-[.F115];&quot;&quot;)">
            <text:p/>
          </table:table-cell>
          <table:table-cell table:style-name="ce393" table:formula="of:=+IF([.$B115]&lt;&gt;&quot;&quot;;A;&quot;&quot;)">
            <text:p/>
          </table:table-cell>
          <table:table-cell table:style-name="ce393" table:formula="of:=+IF([.$B115]&lt;&gt;&quot;&quot;;[.C114]*[.$D$11];&quot;&quot;)">
            <text:p/>
          </table:table-cell>
          <table:table-cell table:style-name="ce393" table:formula="of:=+IF([.$B115]&lt;&gt;&quot;&quot;;[.D115]-[.E115];&quot;&quot;)">
            <text:p/>
          </table:table-cell>
          <table:table-cell table:style-name="ce409" table:formula="of:=+IF([.$C115]&lt;&gt;&quot;&quot;;[.D11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5]+1)&gt;N;&quot;&quot;;([.B115]+1));&quot;&quot;)">
            <text:p/>
          </table:table-cell>
          <table:table-cell table:style-name="ce393" table:formula="of:=+IF([.$B116]&lt;&gt;&quot;&quot;;[.C115]-[.F116];&quot;&quot;)">
            <text:p/>
          </table:table-cell>
          <table:table-cell table:style-name="ce393" table:formula="of:=+IF([.$B116]&lt;&gt;&quot;&quot;;A;&quot;&quot;)">
            <text:p/>
          </table:table-cell>
          <table:table-cell table:style-name="ce393" table:formula="of:=+IF([.$B116]&lt;&gt;&quot;&quot;;[.C115]*[.$D$11];&quot;&quot;)">
            <text:p/>
          </table:table-cell>
          <table:table-cell table:style-name="ce393" table:formula="of:=+IF([.$B116]&lt;&gt;&quot;&quot;;[.D116]-[.E116];&quot;&quot;)">
            <text:p/>
          </table:table-cell>
          <table:table-cell table:style-name="ce409" table:formula="of:=+IF([.$C116]&lt;&gt;&quot;&quot;;[.D11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6]+1)&gt;N;&quot;&quot;;([.B116]+1));&quot;&quot;)">
            <text:p/>
          </table:table-cell>
          <table:table-cell table:style-name="ce393" table:formula="of:=+IF([.$B117]&lt;&gt;&quot;&quot;;[.C116]-[.F117];&quot;&quot;)">
            <text:p/>
          </table:table-cell>
          <table:table-cell table:style-name="ce393" table:formula="of:=+IF([.$B117]&lt;&gt;&quot;&quot;;A;&quot;&quot;)">
            <text:p/>
          </table:table-cell>
          <table:table-cell table:style-name="ce393" table:formula="of:=+IF([.$B117]&lt;&gt;&quot;&quot;;[.C116]*[.$D$11];&quot;&quot;)">
            <text:p/>
          </table:table-cell>
          <table:table-cell table:style-name="ce393" table:formula="of:=+IF([.$B117]&lt;&gt;&quot;&quot;;[.D117]-[.E117];&quot;&quot;)">
            <text:p/>
          </table:table-cell>
          <table:table-cell table:style-name="ce409" table:formula="of:=+IF([.$C117]&lt;&gt;&quot;&quot;;[.D11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7]+1)&gt;N;&quot;&quot;;([.B117]+1));&quot;&quot;)">
            <text:p/>
          </table:table-cell>
          <table:table-cell table:style-name="ce393" table:formula="of:=+IF([.$B118]&lt;&gt;&quot;&quot;;[.C117]-[.F118];&quot;&quot;)">
            <text:p/>
          </table:table-cell>
          <table:table-cell table:style-name="ce393" table:formula="of:=+IF([.$B118]&lt;&gt;&quot;&quot;;A;&quot;&quot;)">
            <text:p/>
          </table:table-cell>
          <table:table-cell table:style-name="ce393" table:formula="of:=+IF([.$B118]&lt;&gt;&quot;&quot;;[.C117]*[.$D$11];&quot;&quot;)">
            <text:p/>
          </table:table-cell>
          <table:table-cell table:style-name="ce393" table:formula="of:=+IF([.$B118]&lt;&gt;&quot;&quot;;[.D118]-[.E118];&quot;&quot;)">
            <text:p/>
          </table:table-cell>
          <table:table-cell table:style-name="ce409" table:formula="of:=+IF([.$C118]&lt;&gt;&quot;&quot;;[.D11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8]+1)&gt;N;&quot;&quot;;([.B118]+1));&quot;&quot;)">
            <text:p/>
          </table:table-cell>
          <table:table-cell table:style-name="ce393" table:formula="of:=+IF([.$B119]&lt;&gt;&quot;&quot;;[.C118]-[.F119];&quot;&quot;)">
            <text:p/>
          </table:table-cell>
          <table:table-cell table:style-name="ce393" table:formula="of:=+IF([.$B119]&lt;&gt;&quot;&quot;;A;&quot;&quot;)">
            <text:p/>
          </table:table-cell>
          <table:table-cell table:style-name="ce393" table:formula="of:=+IF([.$B119]&lt;&gt;&quot;&quot;;[.C118]*[.$D$11];&quot;&quot;)">
            <text:p/>
          </table:table-cell>
          <table:table-cell table:style-name="ce393" table:formula="of:=+IF([.$B119]&lt;&gt;&quot;&quot;;[.D119]-[.E119];&quot;&quot;)">
            <text:p/>
          </table:table-cell>
          <table:table-cell table:style-name="ce409" table:formula="of:=+IF([.$C119]&lt;&gt;&quot;&quot;;[.D11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19]+1)&gt;N;&quot;&quot;;([.B119]+1));&quot;&quot;)">
            <text:p/>
          </table:table-cell>
          <table:table-cell table:style-name="ce393" table:formula="of:=+IF([.$B120]&lt;&gt;&quot;&quot;;[.C119]-[.F120];&quot;&quot;)">
            <text:p/>
          </table:table-cell>
          <table:table-cell table:style-name="ce393" table:formula="of:=+IF([.$B120]&lt;&gt;&quot;&quot;;A;&quot;&quot;)">
            <text:p/>
          </table:table-cell>
          <table:table-cell table:style-name="ce393" table:formula="of:=+IF([.$B120]&lt;&gt;&quot;&quot;;[.C119]*[.$D$11];&quot;&quot;)">
            <text:p/>
          </table:table-cell>
          <table:table-cell table:style-name="ce393" table:formula="of:=+IF([.$B120]&lt;&gt;&quot;&quot;;[.D120]-[.E120];&quot;&quot;)">
            <text:p/>
          </table:table-cell>
          <table:table-cell table:style-name="ce409" table:formula="of:=+IF([.$C120]&lt;&gt;&quot;&quot;;[.D12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0]+1)&gt;N;&quot;&quot;;([.B120]+1));&quot;&quot;)">
            <text:p/>
          </table:table-cell>
          <table:table-cell table:style-name="ce393" table:formula="of:=+IF([.$B121]&lt;&gt;&quot;&quot;;[.C120]-[.F121];&quot;&quot;)">
            <text:p/>
          </table:table-cell>
          <table:table-cell table:style-name="ce393" table:formula="of:=+IF([.$B121]&lt;&gt;&quot;&quot;;A;&quot;&quot;)">
            <text:p/>
          </table:table-cell>
          <table:table-cell table:style-name="ce393" table:formula="of:=+IF([.$B121]&lt;&gt;&quot;&quot;;[.C120]*[.$D$11];&quot;&quot;)">
            <text:p/>
          </table:table-cell>
          <table:table-cell table:style-name="ce393" table:formula="of:=+IF([.$B121]&lt;&gt;&quot;&quot;;[.D121]-[.E121];&quot;&quot;)">
            <text:p/>
          </table:table-cell>
          <table:table-cell table:style-name="ce409" table:formula="of:=+IF([.$C121]&lt;&gt;&quot;&quot;;[.D12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1]+1)&gt;N;&quot;&quot;;([.B121]+1));&quot;&quot;)">
            <text:p/>
          </table:table-cell>
          <table:table-cell table:style-name="ce393" table:formula="of:=+IF([.$B122]&lt;&gt;&quot;&quot;;[.C121]-[.F122];&quot;&quot;)">
            <text:p/>
          </table:table-cell>
          <table:table-cell table:style-name="ce393" table:formula="of:=+IF([.$B122]&lt;&gt;&quot;&quot;;A;&quot;&quot;)">
            <text:p/>
          </table:table-cell>
          <table:table-cell table:style-name="ce393" table:formula="of:=+IF([.$B122]&lt;&gt;&quot;&quot;;[.C121]*[.$D$11];&quot;&quot;)">
            <text:p/>
          </table:table-cell>
          <table:table-cell table:style-name="ce393" table:formula="of:=+IF([.$B122]&lt;&gt;&quot;&quot;;[.D122]-[.E122];&quot;&quot;)">
            <text:p/>
          </table:table-cell>
          <table:table-cell table:style-name="ce409" table:formula="of:=+IF([.$C122]&lt;&gt;&quot;&quot;;[.D12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2]+1)&gt;N;&quot;&quot;;([.B122]+1));&quot;&quot;)">
            <text:p/>
          </table:table-cell>
          <table:table-cell table:style-name="ce393" table:formula="of:=+IF([.$B123]&lt;&gt;&quot;&quot;;[.C122]-[.F123];&quot;&quot;)">
            <text:p/>
          </table:table-cell>
          <table:table-cell table:style-name="ce393" table:formula="of:=+IF([.$B123]&lt;&gt;&quot;&quot;;A;&quot;&quot;)">
            <text:p/>
          </table:table-cell>
          <table:table-cell table:style-name="ce393" table:formula="of:=+IF([.$B123]&lt;&gt;&quot;&quot;;[.C122]*[.$D$11];&quot;&quot;)">
            <text:p/>
          </table:table-cell>
          <table:table-cell table:style-name="ce393" table:formula="of:=+IF([.$B123]&lt;&gt;&quot;&quot;;[.D123]-[.E123];&quot;&quot;)">
            <text:p/>
          </table:table-cell>
          <table:table-cell table:style-name="ce409" table:formula="of:=+IF([.$C123]&lt;&gt;&quot;&quot;;[.D12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3]+1)&gt;N;&quot;&quot;;([.B123]+1));&quot;&quot;)">
            <text:p/>
          </table:table-cell>
          <table:table-cell table:style-name="ce393" table:formula="of:=+IF([.$B124]&lt;&gt;&quot;&quot;;[.C123]-[.F124];&quot;&quot;)">
            <text:p/>
          </table:table-cell>
          <table:table-cell table:style-name="ce393" table:formula="of:=+IF([.$B124]&lt;&gt;&quot;&quot;;A;&quot;&quot;)">
            <text:p/>
          </table:table-cell>
          <table:table-cell table:style-name="ce393" table:formula="of:=+IF([.$B124]&lt;&gt;&quot;&quot;;[.C123]*[.$D$11];&quot;&quot;)">
            <text:p/>
          </table:table-cell>
          <table:table-cell table:style-name="ce393" table:formula="of:=+IF([.$B124]&lt;&gt;&quot;&quot;;[.D124]-[.E124];&quot;&quot;)">
            <text:p/>
          </table:table-cell>
          <table:table-cell table:style-name="ce409" table:formula="of:=+IF([.$C124]&lt;&gt;&quot;&quot;;[.D12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4]+1)&gt;N;&quot;&quot;;([.B124]+1));&quot;&quot;)">
            <text:p/>
          </table:table-cell>
          <table:table-cell table:style-name="ce393" table:formula="of:=+IF([.$B125]&lt;&gt;&quot;&quot;;[.C124]-[.F125];&quot;&quot;)">
            <text:p/>
          </table:table-cell>
          <table:table-cell table:style-name="ce393" table:formula="of:=+IF([.$B125]&lt;&gt;&quot;&quot;;A;&quot;&quot;)">
            <text:p/>
          </table:table-cell>
          <table:table-cell table:style-name="ce393" table:formula="of:=+IF([.$B125]&lt;&gt;&quot;&quot;;[.C124]*[.$D$11];&quot;&quot;)">
            <text:p/>
          </table:table-cell>
          <table:table-cell table:style-name="ce393" table:formula="of:=+IF([.$B125]&lt;&gt;&quot;&quot;;[.D125]-[.E125];&quot;&quot;)">
            <text:p/>
          </table:table-cell>
          <table:table-cell table:style-name="ce409" table:formula="of:=+IF([.$C125]&lt;&gt;&quot;&quot;;[.D12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5]+1)&gt;N;&quot;&quot;;([.B125]+1));&quot;&quot;)">
            <text:p/>
          </table:table-cell>
          <table:table-cell table:style-name="ce393" table:formula="of:=+IF([.$B126]&lt;&gt;&quot;&quot;;[.C125]-[.F126];&quot;&quot;)">
            <text:p/>
          </table:table-cell>
          <table:table-cell table:style-name="ce393" table:formula="of:=+IF([.$B126]&lt;&gt;&quot;&quot;;A;&quot;&quot;)">
            <text:p/>
          </table:table-cell>
          <table:table-cell table:style-name="ce393" table:formula="of:=+IF([.$B126]&lt;&gt;&quot;&quot;;[.C125]*[.$D$11];&quot;&quot;)">
            <text:p/>
          </table:table-cell>
          <table:table-cell table:style-name="ce393" table:formula="of:=+IF([.$B126]&lt;&gt;&quot;&quot;;[.D126]-[.E126];&quot;&quot;)">
            <text:p/>
          </table:table-cell>
          <table:table-cell table:style-name="ce409" table:formula="of:=+IF([.$C126]&lt;&gt;&quot;&quot;;[.D12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6]+1)&gt;N;&quot;&quot;;([.B126]+1));&quot;&quot;)">
            <text:p/>
          </table:table-cell>
          <table:table-cell table:style-name="ce393" table:formula="of:=+IF([.$B127]&lt;&gt;&quot;&quot;;[.C126]-[.F127];&quot;&quot;)">
            <text:p/>
          </table:table-cell>
          <table:table-cell table:style-name="ce393" table:formula="of:=+IF([.$B127]&lt;&gt;&quot;&quot;;A;&quot;&quot;)">
            <text:p/>
          </table:table-cell>
          <table:table-cell table:style-name="ce393" table:formula="of:=+IF([.$B127]&lt;&gt;&quot;&quot;;[.C126]*[.$D$11];&quot;&quot;)">
            <text:p/>
          </table:table-cell>
          <table:table-cell table:style-name="ce393" table:formula="of:=+IF([.$B127]&lt;&gt;&quot;&quot;;[.D127]-[.E127];&quot;&quot;)">
            <text:p/>
          </table:table-cell>
          <table:table-cell table:style-name="ce409" table:formula="of:=+IF([.$C127]&lt;&gt;&quot;&quot;;[.D12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7]+1)&gt;N;&quot;&quot;;([.B127]+1));&quot;&quot;)">
            <text:p/>
          </table:table-cell>
          <table:table-cell table:style-name="ce393" table:formula="of:=+IF([.$B128]&lt;&gt;&quot;&quot;;[.C127]-[.F128];&quot;&quot;)">
            <text:p/>
          </table:table-cell>
          <table:table-cell table:style-name="ce393" table:formula="of:=+IF([.$B128]&lt;&gt;&quot;&quot;;A;&quot;&quot;)">
            <text:p/>
          </table:table-cell>
          <table:table-cell table:style-name="ce393" table:formula="of:=+IF([.$B128]&lt;&gt;&quot;&quot;;[.C127]*[.$D$11];&quot;&quot;)">
            <text:p/>
          </table:table-cell>
          <table:table-cell table:style-name="ce393" table:formula="of:=+IF([.$B128]&lt;&gt;&quot;&quot;;[.D128]-[.E128];&quot;&quot;)">
            <text:p/>
          </table:table-cell>
          <table:table-cell table:style-name="ce409" table:formula="of:=+IF([.$C128]&lt;&gt;&quot;&quot;;[.D12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8]+1)&gt;N;&quot;&quot;;([.B128]+1));&quot;&quot;)">
            <text:p/>
          </table:table-cell>
          <table:table-cell table:style-name="ce393" table:formula="of:=+IF([.$B129]&lt;&gt;&quot;&quot;;[.C128]-[.F129];&quot;&quot;)">
            <text:p/>
          </table:table-cell>
          <table:table-cell table:style-name="ce393" table:formula="of:=+IF([.$B129]&lt;&gt;&quot;&quot;;A;&quot;&quot;)">
            <text:p/>
          </table:table-cell>
          <table:table-cell table:style-name="ce393" table:formula="of:=+IF([.$B129]&lt;&gt;&quot;&quot;;[.C128]*[.$D$11];&quot;&quot;)">
            <text:p/>
          </table:table-cell>
          <table:table-cell table:style-name="ce393" table:formula="of:=+IF([.$B129]&lt;&gt;&quot;&quot;;[.D129]-[.E129];&quot;&quot;)">
            <text:p/>
          </table:table-cell>
          <table:table-cell table:style-name="ce409" table:formula="of:=+IF([.$C129]&lt;&gt;&quot;&quot;;[.D12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29]+1)&gt;N;&quot;&quot;;([.B129]+1));&quot;&quot;)">
            <text:p/>
          </table:table-cell>
          <table:table-cell table:style-name="ce393" table:formula="of:=+IF([.$B130]&lt;&gt;&quot;&quot;;[.C129]-[.F130];&quot;&quot;)">
            <text:p/>
          </table:table-cell>
          <table:table-cell table:style-name="ce393" table:formula="of:=+IF([.$B130]&lt;&gt;&quot;&quot;;A;&quot;&quot;)">
            <text:p/>
          </table:table-cell>
          <table:table-cell table:style-name="ce393" table:formula="of:=+IF([.$B130]&lt;&gt;&quot;&quot;;[.C129]*[.$D$11];&quot;&quot;)">
            <text:p/>
          </table:table-cell>
          <table:table-cell table:style-name="ce393" table:formula="of:=+IF([.$B130]&lt;&gt;&quot;&quot;;[.D130]-[.E130];&quot;&quot;)">
            <text:p/>
          </table:table-cell>
          <table:table-cell table:style-name="ce409" table:formula="of:=+IF([.$C130]&lt;&gt;&quot;&quot;;[.D13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0]+1)&gt;N;&quot;&quot;;([.B130]+1));&quot;&quot;)">
            <text:p/>
          </table:table-cell>
          <table:table-cell table:style-name="ce393" table:formula="of:=+IF([.$B131]&lt;&gt;&quot;&quot;;[.C130]-[.F131];&quot;&quot;)">
            <text:p/>
          </table:table-cell>
          <table:table-cell table:style-name="ce393" table:formula="of:=+IF([.$B131]&lt;&gt;&quot;&quot;;A;&quot;&quot;)">
            <text:p/>
          </table:table-cell>
          <table:table-cell table:style-name="ce393" table:formula="of:=+IF([.$B131]&lt;&gt;&quot;&quot;;[.C130]*[.$D$11];&quot;&quot;)">
            <text:p/>
          </table:table-cell>
          <table:table-cell table:style-name="ce393" table:formula="of:=+IF([.$B131]&lt;&gt;&quot;&quot;;[.D131]-[.E131];&quot;&quot;)">
            <text:p/>
          </table:table-cell>
          <table:table-cell table:style-name="ce409" table:formula="of:=+IF([.$C131]&lt;&gt;&quot;&quot;;[.D13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1]+1)&gt;N;&quot;&quot;;([.B131]+1));&quot;&quot;)">
            <text:p/>
          </table:table-cell>
          <table:table-cell table:style-name="ce393" table:formula="of:=+IF([.$B132]&lt;&gt;&quot;&quot;;[.C131]-[.F132];&quot;&quot;)">
            <text:p/>
          </table:table-cell>
          <table:table-cell table:style-name="ce393" table:formula="of:=+IF([.$B132]&lt;&gt;&quot;&quot;;A;&quot;&quot;)">
            <text:p/>
          </table:table-cell>
          <table:table-cell table:style-name="ce393" table:formula="of:=+IF([.$B132]&lt;&gt;&quot;&quot;;[.C131]*[.$D$11];&quot;&quot;)">
            <text:p/>
          </table:table-cell>
          <table:table-cell table:style-name="ce393" table:formula="of:=+IF([.$B132]&lt;&gt;&quot;&quot;;[.D132]-[.E132];&quot;&quot;)">
            <text:p/>
          </table:table-cell>
          <table:table-cell table:style-name="ce409" table:formula="of:=+IF([.$C132]&lt;&gt;&quot;&quot;;[.D13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2]+1)&gt;N;&quot;&quot;;([.B132]+1));&quot;&quot;)">
            <text:p/>
          </table:table-cell>
          <table:table-cell table:style-name="ce393" table:formula="of:=+IF([.$B133]&lt;&gt;&quot;&quot;;[.C132]-[.F133];&quot;&quot;)">
            <text:p/>
          </table:table-cell>
          <table:table-cell table:style-name="ce393" table:formula="of:=+IF([.$B133]&lt;&gt;&quot;&quot;;A;&quot;&quot;)">
            <text:p/>
          </table:table-cell>
          <table:table-cell table:style-name="ce393" table:formula="of:=+IF([.$B133]&lt;&gt;&quot;&quot;;[.C132]*[.$D$11];&quot;&quot;)">
            <text:p/>
          </table:table-cell>
          <table:table-cell table:style-name="ce393" table:formula="of:=+IF([.$B133]&lt;&gt;&quot;&quot;;[.D133]-[.E133];&quot;&quot;)">
            <text:p/>
          </table:table-cell>
          <table:table-cell table:style-name="ce409" table:formula="of:=+IF([.$C133]&lt;&gt;&quot;&quot;;[.D13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3]+1)&gt;N;&quot;&quot;;([.B133]+1));&quot;&quot;)">
            <text:p/>
          </table:table-cell>
          <table:table-cell table:style-name="ce393" table:formula="of:=+IF([.$B134]&lt;&gt;&quot;&quot;;[.C133]-[.F134];&quot;&quot;)">
            <text:p/>
          </table:table-cell>
          <table:table-cell table:style-name="ce393" table:formula="of:=+IF([.$B134]&lt;&gt;&quot;&quot;;A;&quot;&quot;)">
            <text:p/>
          </table:table-cell>
          <table:table-cell table:style-name="ce393" table:formula="of:=+IF([.$B134]&lt;&gt;&quot;&quot;;[.C133]*[.$D$11];&quot;&quot;)">
            <text:p/>
          </table:table-cell>
          <table:table-cell table:style-name="ce393" table:formula="of:=+IF([.$B134]&lt;&gt;&quot;&quot;;[.D134]-[.E134];&quot;&quot;)">
            <text:p/>
          </table:table-cell>
          <table:table-cell table:style-name="ce409" table:formula="of:=+IF([.$C134]&lt;&gt;&quot;&quot;;[.D13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4]+1)&gt;N;&quot;&quot;;([.B134]+1));&quot;&quot;)">
            <text:p/>
          </table:table-cell>
          <table:table-cell table:style-name="ce393" table:formula="of:=+IF([.$B135]&lt;&gt;&quot;&quot;;[.C134]-[.F135];&quot;&quot;)">
            <text:p/>
          </table:table-cell>
          <table:table-cell table:style-name="ce393" table:formula="of:=+IF([.$B135]&lt;&gt;&quot;&quot;;A;&quot;&quot;)">
            <text:p/>
          </table:table-cell>
          <table:table-cell table:style-name="ce393" table:formula="of:=+IF([.$B135]&lt;&gt;&quot;&quot;;[.C134]*[.$D$11];&quot;&quot;)">
            <text:p/>
          </table:table-cell>
          <table:table-cell table:style-name="ce393" table:formula="of:=+IF([.$B135]&lt;&gt;&quot;&quot;;[.D135]-[.E135];&quot;&quot;)">
            <text:p/>
          </table:table-cell>
          <table:table-cell table:style-name="ce409" table:formula="of:=+IF([.$C135]&lt;&gt;&quot;&quot;;[.D13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5]+1)&gt;N;&quot;&quot;;([.B135]+1));&quot;&quot;)">
            <text:p/>
          </table:table-cell>
          <table:table-cell table:style-name="ce393" table:formula="of:=+IF([.$B136]&lt;&gt;&quot;&quot;;[.C135]-[.F136];&quot;&quot;)">
            <text:p/>
          </table:table-cell>
          <table:table-cell table:style-name="ce393" table:formula="of:=+IF([.$B136]&lt;&gt;&quot;&quot;;A;&quot;&quot;)">
            <text:p/>
          </table:table-cell>
          <table:table-cell table:style-name="ce393" table:formula="of:=+IF([.$B136]&lt;&gt;&quot;&quot;;[.C135]*[.$D$11];&quot;&quot;)">
            <text:p/>
          </table:table-cell>
          <table:table-cell table:style-name="ce393" table:formula="of:=+IF([.$B136]&lt;&gt;&quot;&quot;;[.D136]-[.E136];&quot;&quot;)">
            <text:p/>
          </table:table-cell>
          <table:table-cell table:style-name="ce409" table:formula="of:=+IF([.$C136]&lt;&gt;&quot;&quot;;[.D13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6]+1)&gt;N;&quot;&quot;;([.B136]+1));&quot;&quot;)">
            <text:p/>
          </table:table-cell>
          <table:table-cell table:style-name="ce393" table:formula="of:=+IF([.$B137]&lt;&gt;&quot;&quot;;[.C136]-[.F137];&quot;&quot;)">
            <text:p/>
          </table:table-cell>
          <table:table-cell table:style-name="ce393" table:formula="of:=+IF([.$B137]&lt;&gt;&quot;&quot;;A;&quot;&quot;)">
            <text:p/>
          </table:table-cell>
          <table:table-cell table:style-name="ce393" table:formula="of:=+IF([.$B137]&lt;&gt;&quot;&quot;;[.C136]*[.$D$11];&quot;&quot;)">
            <text:p/>
          </table:table-cell>
          <table:table-cell table:style-name="ce393" table:formula="of:=+IF([.$B137]&lt;&gt;&quot;&quot;;[.D137]-[.E137];&quot;&quot;)">
            <text:p/>
          </table:table-cell>
          <table:table-cell table:style-name="ce409" table:formula="of:=+IF([.$C137]&lt;&gt;&quot;&quot;;[.D13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7]+1)&gt;N;&quot;&quot;;([.B137]+1));&quot;&quot;)">
            <text:p/>
          </table:table-cell>
          <table:table-cell table:style-name="ce393" table:formula="of:=+IF([.$B138]&lt;&gt;&quot;&quot;;[.C137]-[.F138];&quot;&quot;)">
            <text:p/>
          </table:table-cell>
          <table:table-cell table:style-name="ce393" table:formula="of:=+IF([.$B138]&lt;&gt;&quot;&quot;;A;&quot;&quot;)">
            <text:p/>
          </table:table-cell>
          <table:table-cell table:style-name="ce393" table:formula="of:=+IF([.$B138]&lt;&gt;&quot;&quot;;[.C137]*[.$D$11];&quot;&quot;)">
            <text:p/>
          </table:table-cell>
          <table:table-cell table:style-name="ce393" table:formula="of:=+IF([.$B138]&lt;&gt;&quot;&quot;;[.D138]-[.E138];&quot;&quot;)">
            <text:p/>
          </table:table-cell>
          <table:table-cell table:style-name="ce409" table:formula="of:=+IF([.$C138]&lt;&gt;&quot;&quot;;[.D13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8]+1)&gt;N;&quot;&quot;;([.B138]+1));&quot;&quot;)">
            <text:p/>
          </table:table-cell>
          <table:table-cell table:style-name="ce393" table:formula="of:=+IF([.$B139]&lt;&gt;&quot;&quot;;[.C138]-[.F139];&quot;&quot;)">
            <text:p/>
          </table:table-cell>
          <table:table-cell table:style-name="ce393" table:formula="of:=+IF([.$B139]&lt;&gt;&quot;&quot;;A;&quot;&quot;)">
            <text:p/>
          </table:table-cell>
          <table:table-cell table:style-name="ce393" table:formula="of:=+IF([.$B139]&lt;&gt;&quot;&quot;;[.C138]*[.$D$11];&quot;&quot;)">
            <text:p/>
          </table:table-cell>
          <table:table-cell table:style-name="ce393" table:formula="of:=+IF([.$B139]&lt;&gt;&quot;&quot;;[.D139]-[.E139];&quot;&quot;)">
            <text:p/>
          </table:table-cell>
          <table:table-cell table:style-name="ce409" table:formula="of:=+IF([.$C139]&lt;&gt;&quot;&quot;;[.D13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39]+1)&gt;N;&quot;&quot;;([.B139]+1));&quot;&quot;)">
            <text:p/>
          </table:table-cell>
          <table:table-cell table:style-name="ce393" table:formula="of:=+IF([.$B140]&lt;&gt;&quot;&quot;;[.C139]-[.F140];&quot;&quot;)">
            <text:p/>
          </table:table-cell>
          <table:table-cell table:style-name="ce393" table:formula="of:=+IF([.$B140]&lt;&gt;&quot;&quot;;A;&quot;&quot;)">
            <text:p/>
          </table:table-cell>
          <table:table-cell table:style-name="ce393" table:formula="of:=+IF([.$B140]&lt;&gt;&quot;&quot;;[.C139]*[.$D$11];&quot;&quot;)">
            <text:p/>
          </table:table-cell>
          <table:table-cell table:style-name="ce393" table:formula="of:=+IF([.$B140]&lt;&gt;&quot;&quot;;[.D140]-[.E140];&quot;&quot;)">
            <text:p/>
          </table:table-cell>
          <table:table-cell table:style-name="ce409" table:formula="of:=+IF([.$C140]&lt;&gt;&quot;&quot;;[.D14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0]+1)&gt;N;&quot;&quot;;([.B140]+1));&quot;&quot;)">
            <text:p/>
          </table:table-cell>
          <table:table-cell table:style-name="ce393" table:formula="of:=+IF([.$B141]&lt;&gt;&quot;&quot;;[.C140]-[.F141];&quot;&quot;)">
            <text:p/>
          </table:table-cell>
          <table:table-cell table:style-name="ce393" table:formula="of:=+IF([.$B141]&lt;&gt;&quot;&quot;;A;&quot;&quot;)">
            <text:p/>
          </table:table-cell>
          <table:table-cell table:style-name="ce393" table:formula="of:=+IF([.$B141]&lt;&gt;&quot;&quot;;[.C140]*[.$D$11];&quot;&quot;)">
            <text:p/>
          </table:table-cell>
          <table:table-cell table:style-name="ce393" table:formula="of:=+IF([.$B141]&lt;&gt;&quot;&quot;;[.D141]-[.E141];&quot;&quot;)">
            <text:p/>
          </table:table-cell>
          <table:table-cell table:style-name="ce409" table:formula="of:=+IF([.$C141]&lt;&gt;&quot;&quot;;[.D14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1]+1)&gt;N;&quot;&quot;;([.B141]+1));&quot;&quot;)">
            <text:p/>
          </table:table-cell>
          <table:table-cell table:style-name="ce393" table:formula="of:=+IF([.$B142]&lt;&gt;&quot;&quot;;[.C141]-[.F142];&quot;&quot;)">
            <text:p/>
          </table:table-cell>
          <table:table-cell table:style-name="ce393" table:formula="of:=+IF([.$B142]&lt;&gt;&quot;&quot;;A;&quot;&quot;)">
            <text:p/>
          </table:table-cell>
          <table:table-cell table:style-name="ce393" table:formula="of:=+IF([.$B142]&lt;&gt;&quot;&quot;;[.C141]*[.$D$11];&quot;&quot;)">
            <text:p/>
          </table:table-cell>
          <table:table-cell table:style-name="ce393" table:formula="of:=+IF([.$B142]&lt;&gt;&quot;&quot;;[.D142]-[.E142];&quot;&quot;)">
            <text:p/>
          </table:table-cell>
          <table:table-cell table:style-name="ce409" table:formula="of:=+IF([.$C142]&lt;&gt;&quot;&quot;;[.D14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2]+1)&gt;N;&quot;&quot;;([.B142]+1));&quot;&quot;)">
            <text:p/>
          </table:table-cell>
          <table:table-cell table:style-name="ce393" table:formula="of:=+IF([.$B143]&lt;&gt;&quot;&quot;;[.C142]-[.F143];&quot;&quot;)">
            <text:p/>
          </table:table-cell>
          <table:table-cell table:style-name="ce393" table:formula="of:=+IF([.$B143]&lt;&gt;&quot;&quot;;A;&quot;&quot;)">
            <text:p/>
          </table:table-cell>
          <table:table-cell table:style-name="ce393" table:formula="of:=+IF([.$B143]&lt;&gt;&quot;&quot;;[.C142]*[.$D$11];&quot;&quot;)">
            <text:p/>
          </table:table-cell>
          <table:table-cell table:style-name="ce393" table:formula="of:=+IF([.$B143]&lt;&gt;&quot;&quot;;[.D143]-[.E143];&quot;&quot;)">
            <text:p/>
          </table:table-cell>
          <table:table-cell table:style-name="ce409" table:formula="of:=+IF([.$C143]&lt;&gt;&quot;&quot;;[.D14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3]+1)&gt;N;&quot;&quot;;([.B143]+1));&quot;&quot;)">
            <text:p/>
          </table:table-cell>
          <table:table-cell table:style-name="ce393" table:formula="of:=+IF([.$B144]&lt;&gt;&quot;&quot;;[.C143]-[.F144];&quot;&quot;)">
            <text:p/>
          </table:table-cell>
          <table:table-cell table:style-name="ce393" table:formula="of:=+IF([.$B144]&lt;&gt;&quot;&quot;;A;&quot;&quot;)">
            <text:p/>
          </table:table-cell>
          <table:table-cell table:style-name="ce393" table:formula="of:=+IF([.$B144]&lt;&gt;&quot;&quot;;[.C143]*[.$D$11];&quot;&quot;)">
            <text:p/>
          </table:table-cell>
          <table:table-cell table:style-name="ce393" table:formula="of:=+IF([.$B144]&lt;&gt;&quot;&quot;;[.D144]-[.E144];&quot;&quot;)">
            <text:p/>
          </table:table-cell>
          <table:table-cell table:style-name="ce409" table:formula="of:=+IF([.$C144]&lt;&gt;&quot;&quot;;[.D14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4]+1)&gt;N;&quot;&quot;;([.B144]+1));&quot;&quot;)">
            <text:p/>
          </table:table-cell>
          <table:table-cell table:style-name="ce393" table:formula="of:=+IF([.$B145]&lt;&gt;&quot;&quot;;[.C144]-[.F145];&quot;&quot;)">
            <text:p/>
          </table:table-cell>
          <table:table-cell table:style-name="ce393" table:formula="of:=+IF([.$B145]&lt;&gt;&quot;&quot;;A;&quot;&quot;)">
            <text:p/>
          </table:table-cell>
          <table:table-cell table:style-name="ce393" table:formula="of:=+IF([.$B145]&lt;&gt;&quot;&quot;;[.C144]*[.$D$11];&quot;&quot;)">
            <text:p/>
          </table:table-cell>
          <table:table-cell table:style-name="ce393" table:formula="of:=+IF([.$B145]&lt;&gt;&quot;&quot;;[.D145]-[.E145];&quot;&quot;)">
            <text:p/>
          </table:table-cell>
          <table:table-cell table:style-name="ce409" table:formula="of:=+IF([.$C145]&lt;&gt;&quot;&quot;;[.D14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5]+1)&gt;N;&quot;&quot;;([.B145]+1));&quot;&quot;)">
            <text:p/>
          </table:table-cell>
          <table:table-cell table:style-name="ce393" table:formula="of:=+IF([.$B146]&lt;&gt;&quot;&quot;;[.C145]-[.F146];&quot;&quot;)">
            <text:p/>
          </table:table-cell>
          <table:table-cell table:style-name="ce393" table:formula="of:=+IF([.$B146]&lt;&gt;&quot;&quot;;A;&quot;&quot;)">
            <text:p/>
          </table:table-cell>
          <table:table-cell table:style-name="ce393" table:formula="of:=+IF([.$B146]&lt;&gt;&quot;&quot;;[.C145]*[.$D$11];&quot;&quot;)">
            <text:p/>
          </table:table-cell>
          <table:table-cell table:style-name="ce393" table:formula="of:=+IF([.$B146]&lt;&gt;&quot;&quot;;[.D146]-[.E146];&quot;&quot;)">
            <text:p/>
          </table:table-cell>
          <table:table-cell table:style-name="ce409" table:formula="of:=+IF([.$C146]&lt;&gt;&quot;&quot;;[.D14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6]+1)&gt;N;&quot;&quot;;([.B146]+1));&quot;&quot;)">
            <text:p/>
          </table:table-cell>
          <table:table-cell table:style-name="ce393" table:formula="of:=+IF([.$B147]&lt;&gt;&quot;&quot;;[.C146]-[.F147];&quot;&quot;)">
            <text:p/>
          </table:table-cell>
          <table:table-cell table:style-name="ce393" table:formula="of:=+IF([.$B147]&lt;&gt;&quot;&quot;;A;&quot;&quot;)">
            <text:p/>
          </table:table-cell>
          <table:table-cell table:style-name="ce393" table:formula="of:=+IF([.$B147]&lt;&gt;&quot;&quot;;[.C146]*[.$D$11];&quot;&quot;)">
            <text:p/>
          </table:table-cell>
          <table:table-cell table:style-name="ce393" table:formula="of:=+IF([.$B147]&lt;&gt;&quot;&quot;;[.D147]-[.E147];&quot;&quot;)">
            <text:p/>
          </table:table-cell>
          <table:table-cell table:style-name="ce409" table:formula="of:=+IF([.$C147]&lt;&gt;&quot;&quot;;[.D14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7]+1)&gt;N;&quot;&quot;;([.B147]+1));&quot;&quot;)">
            <text:p/>
          </table:table-cell>
          <table:table-cell table:style-name="ce393" table:formula="of:=+IF([.$B148]&lt;&gt;&quot;&quot;;[.C147]-[.F148];&quot;&quot;)">
            <text:p/>
          </table:table-cell>
          <table:table-cell table:style-name="ce393" table:formula="of:=+IF([.$B148]&lt;&gt;&quot;&quot;;A;&quot;&quot;)">
            <text:p/>
          </table:table-cell>
          <table:table-cell table:style-name="ce393" table:formula="of:=+IF([.$B148]&lt;&gt;&quot;&quot;;[.C147]*[.$D$11];&quot;&quot;)">
            <text:p/>
          </table:table-cell>
          <table:table-cell table:style-name="ce393" table:formula="of:=+IF([.$B148]&lt;&gt;&quot;&quot;;[.D148]-[.E148];&quot;&quot;)">
            <text:p/>
          </table:table-cell>
          <table:table-cell table:style-name="ce409" table:formula="of:=+IF([.$C148]&lt;&gt;&quot;&quot;;[.D14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8]+1)&gt;N;&quot;&quot;;([.B148]+1));&quot;&quot;)">
            <text:p/>
          </table:table-cell>
          <table:table-cell table:style-name="ce393" table:formula="of:=+IF([.$B149]&lt;&gt;&quot;&quot;;[.C148]-[.F149];&quot;&quot;)">
            <text:p/>
          </table:table-cell>
          <table:table-cell table:style-name="ce393" table:formula="of:=+IF([.$B149]&lt;&gt;&quot;&quot;;A;&quot;&quot;)">
            <text:p/>
          </table:table-cell>
          <table:table-cell table:style-name="ce393" table:formula="of:=+IF([.$B149]&lt;&gt;&quot;&quot;;[.C148]*[.$D$11];&quot;&quot;)">
            <text:p/>
          </table:table-cell>
          <table:table-cell table:style-name="ce393" table:formula="of:=+IF([.$B149]&lt;&gt;&quot;&quot;;[.D149]-[.E149];&quot;&quot;)">
            <text:p/>
          </table:table-cell>
          <table:table-cell table:style-name="ce409" table:formula="of:=+IF([.$C149]&lt;&gt;&quot;&quot;;[.D14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49]+1)&gt;N;&quot;&quot;;([.B149]+1));&quot;&quot;)">
            <text:p/>
          </table:table-cell>
          <table:table-cell table:style-name="ce393" table:formula="of:=+IF([.$B150]&lt;&gt;&quot;&quot;;[.C149]-[.F150];&quot;&quot;)">
            <text:p/>
          </table:table-cell>
          <table:table-cell table:style-name="ce393" table:formula="of:=+IF([.$B150]&lt;&gt;&quot;&quot;;A;&quot;&quot;)">
            <text:p/>
          </table:table-cell>
          <table:table-cell table:style-name="ce393" table:formula="of:=+IF([.$B150]&lt;&gt;&quot;&quot;;[.C149]*[.$D$11];&quot;&quot;)">
            <text:p/>
          </table:table-cell>
          <table:table-cell table:style-name="ce393" table:formula="of:=+IF([.$B150]&lt;&gt;&quot;&quot;;[.D150]-[.E150];&quot;&quot;)">
            <text:p/>
          </table:table-cell>
          <table:table-cell table:style-name="ce409" table:formula="of:=+IF([.$C150]&lt;&gt;&quot;&quot;;[.D15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0]+1)&gt;N;&quot;&quot;;([.B150]+1));&quot;&quot;)">
            <text:p/>
          </table:table-cell>
          <table:table-cell table:style-name="ce393" table:formula="of:=+IF([.$B151]&lt;&gt;&quot;&quot;;[.C150]-[.F151];&quot;&quot;)">
            <text:p/>
          </table:table-cell>
          <table:table-cell table:style-name="ce393" table:formula="of:=+IF([.$B151]&lt;&gt;&quot;&quot;;A;&quot;&quot;)">
            <text:p/>
          </table:table-cell>
          <table:table-cell table:style-name="ce393" table:formula="of:=+IF([.$B151]&lt;&gt;&quot;&quot;;[.C150]*[.$D$11];&quot;&quot;)">
            <text:p/>
          </table:table-cell>
          <table:table-cell table:style-name="ce393" table:formula="of:=+IF([.$B151]&lt;&gt;&quot;&quot;;[.D151]-[.E151];&quot;&quot;)">
            <text:p/>
          </table:table-cell>
          <table:table-cell table:style-name="ce409" table:formula="of:=+IF([.$C151]&lt;&gt;&quot;&quot;;[.D15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1]+1)&gt;N;&quot;&quot;;([.B151]+1));&quot;&quot;)">
            <text:p/>
          </table:table-cell>
          <table:table-cell table:style-name="ce393" table:formula="of:=+IF([.$B152]&lt;&gt;&quot;&quot;;[.C151]-[.F152];&quot;&quot;)">
            <text:p/>
          </table:table-cell>
          <table:table-cell table:style-name="ce393" table:formula="of:=+IF([.$B152]&lt;&gt;&quot;&quot;;A;&quot;&quot;)">
            <text:p/>
          </table:table-cell>
          <table:table-cell table:style-name="ce393" table:formula="of:=+IF([.$B152]&lt;&gt;&quot;&quot;;[.C151]*[.$D$11];&quot;&quot;)">
            <text:p/>
          </table:table-cell>
          <table:table-cell table:style-name="ce393" table:formula="of:=+IF([.$B152]&lt;&gt;&quot;&quot;;[.D152]-[.E152];&quot;&quot;)">
            <text:p/>
          </table:table-cell>
          <table:table-cell table:style-name="ce409" table:formula="of:=+IF([.$C152]&lt;&gt;&quot;&quot;;[.D15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2]+1)&gt;N;&quot;&quot;;([.B152]+1));&quot;&quot;)">
            <text:p/>
          </table:table-cell>
          <table:table-cell table:style-name="ce393" table:formula="of:=+IF([.$B153]&lt;&gt;&quot;&quot;;[.C152]-[.F153];&quot;&quot;)">
            <text:p/>
          </table:table-cell>
          <table:table-cell table:style-name="ce393" table:formula="of:=+IF([.$B153]&lt;&gt;&quot;&quot;;A;&quot;&quot;)">
            <text:p/>
          </table:table-cell>
          <table:table-cell table:style-name="ce393" table:formula="of:=+IF([.$B153]&lt;&gt;&quot;&quot;;[.C152]*[.$D$11];&quot;&quot;)">
            <text:p/>
          </table:table-cell>
          <table:table-cell table:style-name="ce393" table:formula="of:=+IF([.$B153]&lt;&gt;&quot;&quot;;[.D153]-[.E153];&quot;&quot;)">
            <text:p/>
          </table:table-cell>
          <table:table-cell table:style-name="ce409" table:formula="of:=+IF([.$C153]&lt;&gt;&quot;&quot;;[.D15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3]+1)&gt;N;&quot;&quot;;([.B153]+1));&quot;&quot;)">
            <text:p/>
          </table:table-cell>
          <table:table-cell table:style-name="ce393" table:formula="of:=+IF([.$B154]&lt;&gt;&quot;&quot;;[.C153]-[.F154];&quot;&quot;)">
            <text:p/>
          </table:table-cell>
          <table:table-cell table:style-name="ce393" table:formula="of:=+IF([.$B154]&lt;&gt;&quot;&quot;;A;&quot;&quot;)">
            <text:p/>
          </table:table-cell>
          <table:table-cell table:style-name="ce393" table:formula="of:=+IF([.$B154]&lt;&gt;&quot;&quot;;[.C153]*[.$D$11];&quot;&quot;)">
            <text:p/>
          </table:table-cell>
          <table:table-cell table:style-name="ce393" table:formula="of:=+IF([.$B154]&lt;&gt;&quot;&quot;;[.D154]-[.E154];&quot;&quot;)">
            <text:p/>
          </table:table-cell>
          <table:table-cell table:style-name="ce409" table:formula="of:=+IF([.$C154]&lt;&gt;&quot;&quot;;[.D15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4]+1)&gt;N;&quot;&quot;;([.B154]+1));&quot;&quot;)">
            <text:p/>
          </table:table-cell>
          <table:table-cell table:style-name="ce393" table:formula="of:=+IF([.$B155]&lt;&gt;&quot;&quot;;[.C154]-[.F155];&quot;&quot;)">
            <text:p/>
          </table:table-cell>
          <table:table-cell table:style-name="ce393" table:formula="of:=+IF([.$B155]&lt;&gt;&quot;&quot;;A;&quot;&quot;)">
            <text:p/>
          </table:table-cell>
          <table:table-cell table:style-name="ce393" table:formula="of:=+IF([.$B155]&lt;&gt;&quot;&quot;;[.C154]*[.$D$11];&quot;&quot;)">
            <text:p/>
          </table:table-cell>
          <table:table-cell table:style-name="ce393" table:formula="of:=+IF([.$B155]&lt;&gt;&quot;&quot;;[.D155]-[.E155];&quot;&quot;)">
            <text:p/>
          </table:table-cell>
          <table:table-cell table:style-name="ce409" table:formula="of:=+IF([.$C155]&lt;&gt;&quot;&quot;;[.D15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5]+1)&gt;N;&quot;&quot;;([.B155]+1));&quot;&quot;)">
            <text:p/>
          </table:table-cell>
          <table:table-cell table:style-name="ce393" table:formula="of:=+IF([.$B156]&lt;&gt;&quot;&quot;;[.C155]-[.F156];&quot;&quot;)">
            <text:p/>
          </table:table-cell>
          <table:table-cell table:style-name="ce393" table:formula="of:=+IF([.$B156]&lt;&gt;&quot;&quot;;A;&quot;&quot;)">
            <text:p/>
          </table:table-cell>
          <table:table-cell table:style-name="ce393" table:formula="of:=+IF([.$B156]&lt;&gt;&quot;&quot;;[.C155]*[.$D$11];&quot;&quot;)">
            <text:p/>
          </table:table-cell>
          <table:table-cell table:style-name="ce393" table:formula="of:=+IF([.$B156]&lt;&gt;&quot;&quot;;[.D156]-[.E156];&quot;&quot;)">
            <text:p/>
          </table:table-cell>
          <table:table-cell table:style-name="ce409" table:formula="of:=+IF([.$C156]&lt;&gt;&quot;&quot;;[.D15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6]+1)&gt;N;&quot;&quot;;([.B156]+1));&quot;&quot;)">
            <text:p/>
          </table:table-cell>
          <table:table-cell table:style-name="ce393" table:formula="of:=+IF([.$B157]&lt;&gt;&quot;&quot;;[.C156]-[.F157];&quot;&quot;)">
            <text:p/>
          </table:table-cell>
          <table:table-cell table:style-name="ce393" table:formula="of:=+IF([.$B157]&lt;&gt;&quot;&quot;;A;&quot;&quot;)">
            <text:p/>
          </table:table-cell>
          <table:table-cell table:style-name="ce393" table:formula="of:=+IF([.$B157]&lt;&gt;&quot;&quot;;[.C156]*[.$D$11];&quot;&quot;)">
            <text:p/>
          </table:table-cell>
          <table:table-cell table:style-name="ce393" table:formula="of:=+IF([.$B157]&lt;&gt;&quot;&quot;;[.D157]-[.E157];&quot;&quot;)">
            <text:p/>
          </table:table-cell>
          <table:table-cell table:style-name="ce409" table:formula="of:=+IF([.$C157]&lt;&gt;&quot;&quot;;[.D15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7]+1)&gt;N;&quot;&quot;;([.B157]+1));&quot;&quot;)">
            <text:p/>
          </table:table-cell>
          <table:table-cell table:style-name="ce393" table:formula="of:=+IF([.$B158]&lt;&gt;&quot;&quot;;[.C157]-[.F158];&quot;&quot;)">
            <text:p/>
          </table:table-cell>
          <table:table-cell table:style-name="ce393" table:formula="of:=+IF([.$B158]&lt;&gt;&quot;&quot;;A;&quot;&quot;)">
            <text:p/>
          </table:table-cell>
          <table:table-cell table:style-name="ce393" table:formula="of:=+IF([.$B158]&lt;&gt;&quot;&quot;;[.C157]*[.$D$11];&quot;&quot;)">
            <text:p/>
          </table:table-cell>
          <table:table-cell table:style-name="ce393" table:formula="of:=+IF([.$B158]&lt;&gt;&quot;&quot;;[.D158]-[.E158];&quot;&quot;)">
            <text:p/>
          </table:table-cell>
          <table:table-cell table:style-name="ce409" table:formula="of:=+IF([.$C158]&lt;&gt;&quot;&quot;;[.D15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8]+1)&gt;N;&quot;&quot;;([.B158]+1));&quot;&quot;)">
            <text:p/>
          </table:table-cell>
          <table:table-cell table:style-name="ce393" table:formula="of:=+IF([.$B159]&lt;&gt;&quot;&quot;;[.C158]-[.F159];&quot;&quot;)">
            <text:p/>
          </table:table-cell>
          <table:table-cell table:style-name="ce393" table:formula="of:=+IF([.$B159]&lt;&gt;&quot;&quot;;A;&quot;&quot;)">
            <text:p/>
          </table:table-cell>
          <table:table-cell table:style-name="ce393" table:formula="of:=+IF([.$B159]&lt;&gt;&quot;&quot;;[.C158]*[.$D$11];&quot;&quot;)">
            <text:p/>
          </table:table-cell>
          <table:table-cell table:style-name="ce393" table:formula="of:=+IF([.$B159]&lt;&gt;&quot;&quot;;[.D159]-[.E159];&quot;&quot;)">
            <text:p/>
          </table:table-cell>
          <table:table-cell table:style-name="ce409" table:formula="of:=+IF([.$C159]&lt;&gt;&quot;&quot;;[.D15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59]+1)&gt;N;&quot;&quot;;([.B159]+1));&quot;&quot;)">
            <text:p/>
          </table:table-cell>
          <table:table-cell table:style-name="ce393" table:formula="of:=+IF([.$B160]&lt;&gt;&quot;&quot;;[.C159]-[.F160];&quot;&quot;)">
            <text:p/>
          </table:table-cell>
          <table:table-cell table:style-name="ce393" table:formula="of:=+IF([.$B160]&lt;&gt;&quot;&quot;;A;&quot;&quot;)">
            <text:p/>
          </table:table-cell>
          <table:table-cell table:style-name="ce393" table:formula="of:=+IF([.$B160]&lt;&gt;&quot;&quot;;[.C159]*[.$D$11];&quot;&quot;)">
            <text:p/>
          </table:table-cell>
          <table:table-cell table:style-name="ce393" table:formula="of:=+IF([.$B160]&lt;&gt;&quot;&quot;;[.D160]-[.E160];&quot;&quot;)">
            <text:p/>
          </table:table-cell>
          <table:table-cell table:style-name="ce409" table:formula="of:=+IF([.$C160]&lt;&gt;&quot;&quot;;[.D16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0]+1)&gt;N;&quot;&quot;;([.B160]+1));&quot;&quot;)">
            <text:p/>
          </table:table-cell>
          <table:table-cell table:style-name="ce393" table:formula="of:=+IF([.$B161]&lt;&gt;&quot;&quot;;[.C160]-[.F161];&quot;&quot;)">
            <text:p/>
          </table:table-cell>
          <table:table-cell table:style-name="ce393" table:formula="of:=+IF([.$B161]&lt;&gt;&quot;&quot;;A;&quot;&quot;)">
            <text:p/>
          </table:table-cell>
          <table:table-cell table:style-name="ce393" table:formula="of:=+IF([.$B161]&lt;&gt;&quot;&quot;;[.C160]*[.$D$11];&quot;&quot;)">
            <text:p/>
          </table:table-cell>
          <table:table-cell table:style-name="ce393" table:formula="of:=+IF([.$B161]&lt;&gt;&quot;&quot;;[.D161]-[.E161];&quot;&quot;)">
            <text:p/>
          </table:table-cell>
          <table:table-cell table:style-name="ce409" table:formula="of:=+IF([.$C161]&lt;&gt;&quot;&quot;;[.D16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1]+1)&gt;N;&quot;&quot;;([.B161]+1));&quot;&quot;)">
            <text:p/>
          </table:table-cell>
          <table:table-cell table:style-name="ce393" table:formula="of:=+IF([.$B162]&lt;&gt;&quot;&quot;;[.C161]-[.F162];&quot;&quot;)">
            <text:p/>
          </table:table-cell>
          <table:table-cell table:style-name="ce393" table:formula="of:=+IF([.$B162]&lt;&gt;&quot;&quot;;A;&quot;&quot;)">
            <text:p/>
          </table:table-cell>
          <table:table-cell table:style-name="ce393" table:formula="of:=+IF([.$B162]&lt;&gt;&quot;&quot;;[.C161]*[.$D$11];&quot;&quot;)">
            <text:p/>
          </table:table-cell>
          <table:table-cell table:style-name="ce393" table:formula="of:=+IF([.$B162]&lt;&gt;&quot;&quot;;[.D162]-[.E162];&quot;&quot;)">
            <text:p/>
          </table:table-cell>
          <table:table-cell table:style-name="ce409" table:formula="of:=+IF([.$C162]&lt;&gt;&quot;&quot;;[.D16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2]+1)&gt;N;&quot;&quot;;([.B162]+1));&quot;&quot;)">
            <text:p/>
          </table:table-cell>
          <table:table-cell table:style-name="ce393" table:formula="of:=+IF([.$B163]&lt;&gt;&quot;&quot;;[.C162]-[.F163];&quot;&quot;)">
            <text:p/>
          </table:table-cell>
          <table:table-cell table:style-name="ce393" table:formula="of:=+IF([.$B163]&lt;&gt;&quot;&quot;;A;&quot;&quot;)">
            <text:p/>
          </table:table-cell>
          <table:table-cell table:style-name="ce393" table:formula="of:=+IF([.$B163]&lt;&gt;&quot;&quot;;[.C162]*[.$D$11];&quot;&quot;)">
            <text:p/>
          </table:table-cell>
          <table:table-cell table:style-name="ce393" table:formula="of:=+IF([.$B163]&lt;&gt;&quot;&quot;;[.D163]-[.E163];&quot;&quot;)">
            <text:p/>
          </table:table-cell>
          <table:table-cell table:style-name="ce409" table:formula="of:=+IF([.$C163]&lt;&gt;&quot;&quot;;[.D16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3]+1)&gt;N;&quot;&quot;;([.B163]+1));&quot;&quot;)">
            <text:p/>
          </table:table-cell>
          <table:table-cell table:style-name="ce393" table:formula="of:=+IF([.$B164]&lt;&gt;&quot;&quot;;[.C163]-[.F164];&quot;&quot;)">
            <text:p/>
          </table:table-cell>
          <table:table-cell table:style-name="ce393" table:formula="of:=+IF([.$B164]&lt;&gt;&quot;&quot;;A;&quot;&quot;)">
            <text:p/>
          </table:table-cell>
          <table:table-cell table:style-name="ce393" table:formula="of:=+IF([.$B164]&lt;&gt;&quot;&quot;;[.C163]*[.$D$11];&quot;&quot;)">
            <text:p/>
          </table:table-cell>
          <table:table-cell table:style-name="ce393" table:formula="of:=+IF([.$B164]&lt;&gt;&quot;&quot;;[.D164]-[.E164];&quot;&quot;)">
            <text:p/>
          </table:table-cell>
          <table:table-cell table:style-name="ce409" table:formula="of:=+IF([.$C164]&lt;&gt;&quot;&quot;;[.D16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4]+1)&gt;N;&quot;&quot;;([.B164]+1));&quot;&quot;)">
            <text:p/>
          </table:table-cell>
          <table:table-cell table:style-name="ce393" table:formula="of:=+IF([.$B165]&lt;&gt;&quot;&quot;;[.C164]-[.F165];&quot;&quot;)">
            <text:p/>
          </table:table-cell>
          <table:table-cell table:style-name="ce393" table:formula="of:=+IF([.$B165]&lt;&gt;&quot;&quot;;A;&quot;&quot;)">
            <text:p/>
          </table:table-cell>
          <table:table-cell table:style-name="ce393" table:formula="of:=+IF([.$B165]&lt;&gt;&quot;&quot;;[.C164]*[.$D$11];&quot;&quot;)">
            <text:p/>
          </table:table-cell>
          <table:table-cell table:style-name="ce393" table:formula="of:=+IF([.$B165]&lt;&gt;&quot;&quot;;[.D165]-[.E165];&quot;&quot;)">
            <text:p/>
          </table:table-cell>
          <table:table-cell table:style-name="ce409" table:formula="of:=+IF([.$C165]&lt;&gt;&quot;&quot;;[.D16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5]+1)&gt;N;&quot;&quot;;([.B165]+1));&quot;&quot;)">
            <text:p/>
          </table:table-cell>
          <table:table-cell table:style-name="ce393" table:formula="of:=+IF([.$B166]&lt;&gt;&quot;&quot;;[.C165]-[.F166];&quot;&quot;)">
            <text:p/>
          </table:table-cell>
          <table:table-cell table:style-name="ce393" table:formula="of:=+IF([.$B166]&lt;&gt;&quot;&quot;;A;&quot;&quot;)">
            <text:p/>
          </table:table-cell>
          <table:table-cell table:style-name="ce393" table:formula="of:=+IF([.$B166]&lt;&gt;&quot;&quot;;[.C165]*[.$D$11];&quot;&quot;)">
            <text:p/>
          </table:table-cell>
          <table:table-cell table:style-name="ce393" table:formula="of:=+IF([.$B166]&lt;&gt;&quot;&quot;;[.D166]-[.E166];&quot;&quot;)">
            <text:p/>
          </table:table-cell>
          <table:table-cell table:style-name="ce409" table:formula="of:=+IF([.$C166]&lt;&gt;&quot;&quot;;[.D16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6]+1)&gt;N;&quot;&quot;;([.B166]+1));&quot;&quot;)">
            <text:p/>
          </table:table-cell>
          <table:table-cell table:style-name="ce393" table:formula="of:=+IF([.$B167]&lt;&gt;&quot;&quot;;[.C166]-[.F167];&quot;&quot;)">
            <text:p/>
          </table:table-cell>
          <table:table-cell table:style-name="ce393" table:formula="of:=+IF([.$B167]&lt;&gt;&quot;&quot;;A;&quot;&quot;)">
            <text:p/>
          </table:table-cell>
          <table:table-cell table:style-name="ce393" table:formula="of:=+IF([.$B167]&lt;&gt;&quot;&quot;;[.C166]*[.$D$11];&quot;&quot;)">
            <text:p/>
          </table:table-cell>
          <table:table-cell table:style-name="ce393" table:formula="of:=+IF([.$B167]&lt;&gt;&quot;&quot;;[.D167]-[.E167];&quot;&quot;)">
            <text:p/>
          </table:table-cell>
          <table:table-cell table:style-name="ce409" table:formula="of:=+IF([.$C167]&lt;&gt;&quot;&quot;;[.D16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7]+1)&gt;N;&quot;&quot;;([.B167]+1));&quot;&quot;)">
            <text:p/>
          </table:table-cell>
          <table:table-cell table:style-name="ce393" table:formula="of:=+IF([.$B168]&lt;&gt;&quot;&quot;;[.C167]-[.F168];&quot;&quot;)">
            <text:p/>
          </table:table-cell>
          <table:table-cell table:style-name="ce393" table:formula="of:=+IF([.$B168]&lt;&gt;&quot;&quot;;A;&quot;&quot;)">
            <text:p/>
          </table:table-cell>
          <table:table-cell table:style-name="ce393" table:formula="of:=+IF([.$B168]&lt;&gt;&quot;&quot;;[.C167]*[.$D$11];&quot;&quot;)">
            <text:p/>
          </table:table-cell>
          <table:table-cell table:style-name="ce393" table:formula="of:=+IF([.$B168]&lt;&gt;&quot;&quot;;[.D168]-[.E168];&quot;&quot;)">
            <text:p/>
          </table:table-cell>
          <table:table-cell table:style-name="ce409" table:formula="of:=+IF([.$C168]&lt;&gt;&quot;&quot;;[.D16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8]+1)&gt;N;&quot;&quot;;([.B168]+1));&quot;&quot;)">
            <text:p/>
          </table:table-cell>
          <table:table-cell table:style-name="ce393" table:formula="of:=+IF([.$B169]&lt;&gt;&quot;&quot;;[.C168]-[.F169];&quot;&quot;)">
            <text:p/>
          </table:table-cell>
          <table:table-cell table:style-name="ce393" table:formula="of:=+IF([.$B169]&lt;&gt;&quot;&quot;;A;&quot;&quot;)">
            <text:p/>
          </table:table-cell>
          <table:table-cell table:style-name="ce393" table:formula="of:=+IF([.$B169]&lt;&gt;&quot;&quot;;[.C168]*[.$D$11];&quot;&quot;)">
            <text:p/>
          </table:table-cell>
          <table:table-cell table:style-name="ce393" table:formula="of:=+IF([.$B169]&lt;&gt;&quot;&quot;;[.D169]-[.E169];&quot;&quot;)">
            <text:p/>
          </table:table-cell>
          <table:table-cell table:style-name="ce409" table:formula="of:=+IF([.$C169]&lt;&gt;&quot;&quot;;[.D16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69]+1)&gt;N;&quot;&quot;;([.B169]+1));&quot;&quot;)">
            <text:p/>
          </table:table-cell>
          <table:table-cell table:style-name="ce393" table:formula="of:=+IF([.$B170]&lt;&gt;&quot;&quot;;[.C169]-[.F170];&quot;&quot;)">
            <text:p/>
          </table:table-cell>
          <table:table-cell table:style-name="ce393" table:formula="of:=+IF([.$B170]&lt;&gt;&quot;&quot;;A;&quot;&quot;)">
            <text:p/>
          </table:table-cell>
          <table:table-cell table:style-name="ce393" table:formula="of:=+IF([.$B170]&lt;&gt;&quot;&quot;;[.C169]*[.$D$11];&quot;&quot;)">
            <text:p/>
          </table:table-cell>
          <table:table-cell table:style-name="ce393" table:formula="of:=+IF([.$B170]&lt;&gt;&quot;&quot;;[.D170]-[.E170];&quot;&quot;)">
            <text:p/>
          </table:table-cell>
          <table:table-cell table:style-name="ce409" table:formula="of:=+IF([.$C170]&lt;&gt;&quot;&quot;;[.D17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0]+1)&gt;N;&quot;&quot;;([.B170]+1));&quot;&quot;)">
            <text:p/>
          </table:table-cell>
          <table:table-cell table:style-name="ce393" table:formula="of:=+IF([.$B171]&lt;&gt;&quot;&quot;;[.C170]-[.F171];&quot;&quot;)">
            <text:p/>
          </table:table-cell>
          <table:table-cell table:style-name="ce393" table:formula="of:=+IF([.$B171]&lt;&gt;&quot;&quot;;A;&quot;&quot;)">
            <text:p/>
          </table:table-cell>
          <table:table-cell table:style-name="ce393" table:formula="of:=+IF([.$B171]&lt;&gt;&quot;&quot;;[.C170]*[.$D$11];&quot;&quot;)">
            <text:p/>
          </table:table-cell>
          <table:table-cell table:style-name="ce393" table:formula="of:=+IF([.$B171]&lt;&gt;&quot;&quot;;[.D171]-[.E171];&quot;&quot;)">
            <text:p/>
          </table:table-cell>
          <table:table-cell table:style-name="ce409" table:formula="of:=+IF([.$C171]&lt;&gt;&quot;&quot;;[.D17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1]+1)&gt;N;&quot;&quot;;([.B171]+1));&quot;&quot;)">
            <text:p/>
          </table:table-cell>
          <table:table-cell table:style-name="ce393" table:formula="of:=+IF([.$B172]&lt;&gt;&quot;&quot;;[.C171]-[.F172];&quot;&quot;)">
            <text:p/>
          </table:table-cell>
          <table:table-cell table:style-name="ce393" table:formula="of:=+IF([.$B172]&lt;&gt;&quot;&quot;;A;&quot;&quot;)">
            <text:p/>
          </table:table-cell>
          <table:table-cell table:style-name="ce393" table:formula="of:=+IF([.$B172]&lt;&gt;&quot;&quot;;[.C171]*[.$D$11];&quot;&quot;)">
            <text:p/>
          </table:table-cell>
          <table:table-cell table:style-name="ce393" table:formula="of:=+IF([.$B172]&lt;&gt;&quot;&quot;;[.D172]-[.E172];&quot;&quot;)">
            <text:p/>
          </table:table-cell>
          <table:table-cell table:style-name="ce409" table:formula="of:=+IF([.$C172]&lt;&gt;&quot;&quot;;[.D17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2]+1)&gt;N;&quot;&quot;;([.B172]+1));&quot;&quot;)">
            <text:p/>
          </table:table-cell>
          <table:table-cell table:style-name="ce393" table:formula="of:=+IF([.$B173]&lt;&gt;&quot;&quot;;[.C172]-[.F173];&quot;&quot;)">
            <text:p/>
          </table:table-cell>
          <table:table-cell table:style-name="ce393" table:formula="of:=+IF([.$B173]&lt;&gt;&quot;&quot;;A;&quot;&quot;)">
            <text:p/>
          </table:table-cell>
          <table:table-cell table:style-name="ce393" table:formula="of:=+IF([.$B173]&lt;&gt;&quot;&quot;;[.C172]*[.$D$11];&quot;&quot;)">
            <text:p/>
          </table:table-cell>
          <table:table-cell table:style-name="ce393" table:formula="of:=+IF([.$B173]&lt;&gt;&quot;&quot;;[.D173]-[.E173];&quot;&quot;)">
            <text:p/>
          </table:table-cell>
          <table:table-cell table:style-name="ce409" table:formula="of:=+IF([.$C173]&lt;&gt;&quot;&quot;;[.D17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3]+1)&gt;N;&quot;&quot;;([.B173]+1));&quot;&quot;)">
            <text:p/>
          </table:table-cell>
          <table:table-cell table:style-name="ce393" table:formula="of:=+IF([.$B174]&lt;&gt;&quot;&quot;;[.C173]-[.F174];&quot;&quot;)">
            <text:p/>
          </table:table-cell>
          <table:table-cell table:style-name="ce393" table:formula="of:=+IF([.$B174]&lt;&gt;&quot;&quot;;A;&quot;&quot;)">
            <text:p/>
          </table:table-cell>
          <table:table-cell table:style-name="ce393" table:formula="of:=+IF([.$B174]&lt;&gt;&quot;&quot;;[.C173]*[.$D$11];&quot;&quot;)">
            <text:p/>
          </table:table-cell>
          <table:table-cell table:style-name="ce393" table:formula="of:=+IF([.$B174]&lt;&gt;&quot;&quot;;[.D174]-[.E174];&quot;&quot;)">
            <text:p/>
          </table:table-cell>
          <table:table-cell table:style-name="ce409" table:formula="of:=+IF([.$C174]&lt;&gt;&quot;&quot;;[.D17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4]+1)&gt;N;&quot;&quot;;([.B174]+1));&quot;&quot;)">
            <text:p/>
          </table:table-cell>
          <table:table-cell table:style-name="ce393" table:formula="of:=+IF([.$B175]&lt;&gt;&quot;&quot;;[.C174]-[.F175];&quot;&quot;)">
            <text:p/>
          </table:table-cell>
          <table:table-cell table:style-name="ce393" table:formula="of:=+IF([.$B175]&lt;&gt;&quot;&quot;;A;&quot;&quot;)">
            <text:p/>
          </table:table-cell>
          <table:table-cell table:style-name="ce393" table:formula="of:=+IF([.$B175]&lt;&gt;&quot;&quot;;[.C174]*[.$D$11];&quot;&quot;)">
            <text:p/>
          </table:table-cell>
          <table:table-cell table:style-name="ce393" table:formula="of:=+IF([.$B175]&lt;&gt;&quot;&quot;;[.D175]-[.E175];&quot;&quot;)">
            <text:p/>
          </table:table-cell>
          <table:table-cell table:style-name="ce409" table:formula="of:=+IF([.$C175]&lt;&gt;&quot;&quot;;[.D17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5]+1)&gt;N;&quot;&quot;;([.B175]+1));&quot;&quot;)">
            <text:p/>
          </table:table-cell>
          <table:table-cell table:style-name="ce393" table:formula="of:=+IF([.$B176]&lt;&gt;&quot;&quot;;[.C175]-[.F176];&quot;&quot;)">
            <text:p/>
          </table:table-cell>
          <table:table-cell table:style-name="ce393" table:formula="of:=+IF([.$B176]&lt;&gt;&quot;&quot;;A;&quot;&quot;)">
            <text:p/>
          </table:table-cell>
          <table:table-cell table:style-name="ce393" table:formula="of:=+IF([.$B176]&lt;&gt;&quot;&quot;;[.C175]*[.$D$11];&quot;&quot;)">
            <text:p/>
          </table:table-cell>
          <table:table-cell table:style-name="ce393" table:formula="of:=+IF([.$B176]&lt;&gt;&quot;&quot;;[.D176]-[.E176];&quot;&quot;)">
            <text:p/>
          </table:table-cell>
          <table:table-cell table:style-name="ce409" table:formula="of:=+IF([.$C176]&lt;&gt;&quot;&quot;;[.D17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6]+1)&gt;N;&quot;&quot;;([.B176]+1));&quot;&quot;)">
            <text:p/>
          </table:table-cell>
          <table:table-cell table:style-name="ce393" table:formula="of:=+IF([.$B177]&lt;&gt;&quot;&quot;;[.C176]-[.F177];&quot;&quot;)">
            <text:p/>
          </table:table-cell>
          <table:table-cell table:style-name="ce393" table:formula="of:=+IF([.$B177]&lt;&gt;&quot;&quot;;A;&quot;&quot;)">
            <text:p/>
          </table:table-cell>
          <table:table-cell table:style-name="ce393" table:formula="of:=+IF([.$B177]&lt;&gt;&quot;&quot;;[.C176]*[.$D$11];&quot;&quot;)">
            <text:p/>
          </table:table-cell>
          <table:table-cell table:style-name="ce393" table:formula="of:=+IF([.$B177]&lt;&gt;&quot;&quot;;[.D177]-[.E177];&quot;&quot;)">
            <text:p/>
          </table:table-cell>
          <table:table-cell table:style-name="ce409" table:formula="of:=+IF([.$C177]&lt;&gt;&quot;&quot;;[.D17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7]+1)&gt;N;&quot;&quot;;([.B177]+1));&quot;&quot;)">
            <text:p/>
          </table:table-cell>
          <table:table-cell table:style-name="ce393" table:formula="of:=+IF([.$B178]&lt;&gt;&quot;&quot;;[.C177]-[.F178];&quot;&quot;)">
            <text:p/>
          </table:table-cell>
          <table:table-cell table:style-name="ce393" table:formula="of:=+IF([.$B178]&lt;&gt;&quot;&quot;;A;&quot;&quot;)">
            <text:p/>
          </table:table-cell>
          <table:table-cell table:style-name="ce393" table:formula="of:=+IF([.$B178]&lt;&gt;&quot;&quot;;[.C177]*[.$D$11];&quot;&quot;)">
            <text:p/>
          </table:table-cell>
          <table:table-cell table:style-name="ce393" table:formula="of:=+IF([.$B178]&lt;&gt;&quot;&quot;;[.D178]-[.E178];&quot;&quot;)">
            <text:p/>
          </table:table-cell>
          <table:table-cell table:style-name="ce409" table:formula="of:=+IF([.$C178]&lt;&gt;&quot;&quot;;[.D17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8]+1)&gt;N;&quot;&quot;;([.B178]+1));&quot;&quot;)">
            <text:p/>
          </table:table-cell>
          <table:table-cell table:style-name="ce393" table:formula="of:=+IF([.$B179]&lt;&gt;&quot;&quot;;[.C178]-[.F179];&quot;&quot;)">
            <text:p/>
          </table:table-cell>
          <table:table-cell table:style-name="ce393" table:formula="of:=+IF([.$B179]&lt;&gt;&quot;&quot;;A;&quot;&quot;)">
            <text:p/>
          </table:table-cell>
          <table:table-cell table:style-name="ce393" table:formula="of:=+IF([.$B179]&lt;&gt;&quot;&quot;;[.C178]*[.$D$11];&quot;&quot;)">
            <text:p/>
          </table:table-cell>
          <table:table-cell table:style-name="ce393" table:formula="of:=+IF([.$B179]&lt;&gt;&quot;&quot;;[.D179]-[.E179];&quot;&quot;)">
            <text:p/>
          </table:table-cell>
          <table:table-cell table:style-name="ce409" table:formula="of:=+IF([.$C179]&lt;&gt;&quot;&quot;;[.D17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79]+1)&gt;N;&quot;&quot;;([.B179]+1));&quot;&quot;)">
            <text:p/>
          </table:table-cell>
          <table:table-cell table:style-name="ce393" table:formula="of:=+IF([.$B180]&lt;&gt;&quot;&quot;;[.C179]-[.F180];&quot;&quot;)">
            <text:p/>
          </table:table-cell>
          <table:table-cell table:style-name="ce393" table:formula="of:=+IF([.$B180]&lt;&gt;&quot;&quot;;A;&quot;&quot;)">
            <text:p/>
          </table:table-cell>
          <table:table-cell table:style-name="ce393" table:formula="of:=+IF([.$B180]&lt;&gt;&quot;&quot;;[.C179]*[.$D$11];&quot;&quot;)">
            <text:p/>
          </table:table-cell>
          <table:table-cell table:style-name="ce393" table:formula="of:=+IF([.$B180]&lt;&gt;&quot;&quot;;[.D180]-[.E180];&quot;&quot;)">
            <text:p/>
          </table:table-cell>
          <table:table-cell table:style-name="ce409" table:formula="of:=+IF([.$C180]&lt;&gt;&quot;&quot;;[.D18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0]+1)&gt;N;&quot;&quot;;([.B180]+1));&quot;&quot;)">
            <text:p/>
          </table:table-cell>
          <table:table-cell table:style-name="ce393" table:formula="of:=+IF([.$B181]&lt;&gt;&quot;&quot;;[.C180]-[.F181];&quot;&quot;)">
            <text:p/>
          </table:table-cell>
          <table:table-cell table:style-name="ce393" table:formula="of:=+IF([.$B181]&lt;&gt;&quot;&quot;;A;&quot;&quot;)">
            <text:p/>
          </table:table-cell>
          <table:table-cell table:style-name="ce393" table:formula="of:=+IF([.$B181]&lt;&gt;&quot;&quot;;[.C180]*[.$D$11];&quot;&quot;)">
            <text:p/>
          </table:table-cell>
          <table:table-cell table:style-name="ce393" table:formula="of:=+IF([.$B181]&lt;&gt;&quot;&quot;;[.D181]-[.E181];&quot;&quot;)">
            <text:p/>
          </table:table-cell>
          <table:table-cell table:style-name="ce409" table:formula="of:=+IF([.$C181]&lt;&gt;&quot;&quot;;[.D18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1]+1)&gt;N;&quot;&quot;;([.B181]+1));&quot;&quot;)">
            <text:p/>
          </table:table-cell>
          <table:table-cell table:style-name="ce393" table:formula="of:=+IF([.$B182]&lt;&gt;&quot;&quot;;[.C181]-[.F182];&quot;&quot;)">
            <text:p/>
          </table:table-cell>
          <table:table-cell table:style-name="ce393" table:formula="of:=+IF([.$B182]&lt;&gt;&quot;&quot;;A;&quot;&quot;)">
            <text:p/>
          </table:table-cell>
          <table:table-cell table:style-name="ce393" table:formula="of:=+IF([.$B182]&lt;&gt;&quot;&quot;;[.C181]*[.$D$11];&quot;&quot;)">
            <text:p/>
          </table:table-cell>
          <table:table-cell table:style-name="ce393" table:formula="of:=+IF([.$B182]&lt;&gt;&quot;&quot;;[.D182]-[.E182];&quot;&quot;)">
            <text:p/>
          </table:table-cell>
          <table:table-cell table:style-name="ce409" table:formula="of:=+IF([.$C182]&lt;&gt;&quot;&quot;;[.D18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2]+1)&gt;N;&quot;&quot;;([.B182]+1));&quot;&quot;)">
            <text:p/>
          </table:table-cell>
          <table:table-cell table:style-name="ce393" table:formula="of:=+IF([.$B183]&lt;&gt;&quot;&quot;;[.C182]-[.F183];&quot;&quot;)">
            <text:p/>
          </table:table-cell>
          <table:table-cell table:style-name="ce393" table:formula="of:=+IF([.$B183]&lt;&gt;&quot;&quot;;A;&quot;&quot;)">
            <text:p/>
          </table:table-cell>
          <table:table-cell table:style-name="ce393" table:formula="of:=+IF([.$B183]&lt;&gt;&quot;&quot;;[.C182]*[.$D$11];&quot;&quot;)">
            <text:p/>
          </table:table-cell>
          <table:table-cell table:style-name="ce393" table:formula="of:=+IF([.$B183]&lt;&gt;&quot;&quot;;[.D183]-[.E183];&quot;&quot;)">
            <text:p/>
          </table:table-cell>
          <table:table-cell table:style-name="ce409" table:formula="of:=+IF([.$C183]&lt;&gt;&quot;&quot;;[.D18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3]+1)&gt;N;&quot;&quot;;([.B183]+1));&quot;&quot;)">
            <text:p/>
          </table:table-cell>
          <table:table-cell table:style-name="ce393" table:formula="of:=+IF([.$B184]&lt;&gt;&quot;&quot;;[.C183]-[.F184];&quot;&quot;)">
            <text:p/>
          </table:table-cell>
          <table:table-cell table:style-name="ce393" table:formula="of:=+IF([.$B184]&lt;&gt;&quot;&quot;;A;&quot;&quot;)">
            <text:p/>
          </table:table-cell>
          <table:table-cell table:style-name="ce393" table:formula="of:=+IF([.$B184]&lt;&gt;&quot;&quot;;[.C183]*[.$D$11];&quot;&quot;)">
            <text:p/>
          </table:table-cell>
          <table:table-cell table:style-name="ce393" table:formula="of:=+IF([.$B184]&lt;&gt;&quot;&quot;;[.D184]-[.E184];&quot;&quot;)">
            <text:p/>
          </table:table-cell>
          <table:table-cell table:style-name="ce409" table:formula="of:=+IF([.$C184]&lt;&gt;&quot;&quot;;[.D18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4]+1)&gt;N;&quot;&quot;;([.B184]+1));&quot;&quot;)">
            <text:p/>
          </table:table-cell>
          <table:table-cell table:style-name="ce393" table:formula="of:=+IF([.$B185]&lt;&gt;&quot;&quot;;[.C184]-[.F185];&quot;&quot;)">
            <text:p/>
          </table:table-cell>
          <table:table-cell table:style-name="ce393" table:formula="of:=+IF([.$B185]&lt;&gt;&quot;&quot;;A;&quot;&quot;)">
            <text:p/>
          </table:table-cell>
          <table:table-cell table:style-name="ce393" table:formula="of:=+IF([.$B185]&lt;&gt;&quot;&quot;;[.C184]*[.$D$11];&quot;&quot;)">
            <text:p/>
          </table:table-cell>
          <table:table-cell table:style-name="ce393" table:formula="of:=+IF([.$B185]&lt;&gt;&quot;&quot;;[.D185]-[.E185];&quot;&quot;)">
            <text:p/>
          </table:table-cell>
          <table:table-cell table:style-name="ce409" table:formula="of:=+IF([.$C185]&lt;&gt;&quot;&quot;;[.D18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5]+1)&gt;N;&quot;&quot;;([.B185]+1));&quot;&quot;)">
            <text:p/>
          </table:table-cell>
          <table:table-cell table:style-name="ce393" table:formula="of:=+IF([.$B186]&lt;&gt;&quot;&quot;;[.C185]-[.F186];&quot;&quot;)">
            <text:p/>
          </table:table-cell>
          <table:table-cell table:style-name="ce393" table:formula="of:=+IF([.$B186]&lt;&gt;&quot;&quot;;A;&quot;&quot;)">
            <text:p/>
          </table:table-cell>
          <table:table-cell table:style-name="ce393" table:formula="of:=+IF([.$B186]&lt;&gt;&quot;&quot;;[.C185]*[.$D$11];&quot;&quot;)">
            <text:p/>
          </table:table-cell>
          <table:table-cell table:style-name="ce393" table:formula="of:=+IF([.$B186]&lt;&gt;&quot;&quot;;[.D186]-[.E186];&quot;&quot;)">
            <text:p/>
          </table:table-cell>
          <table:table-cell table:style-name="ce409" table:formula="of:=+IF([.$C186]&lt;&gt;&quot;&quot;;[.D18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6]+1)&gt;N;&quot;&quot;;([.B186]+1));&quot;&quot;)">
            <text:p/>
          </table:table-cell>
          <table:table-cell table:style-name="ce393" table:formula="of:=+IF([.$B187]&lt;&gt;&quot;&quot;;[.C186]-[.F187];&quot;&quot;)">
            <text:p/>
          </table:table-cell>
          <table:table-cell table:style-name="ce393" table:formula="of:=+IF([.$B187]&lt;&gt;&quot;&quot;;A;&quot;&quot;)">
            <text:p/>
          </table:table-cell>
          <table:table-cell table:style-name="ce393" table:formula="of:=+IF([.$B187]&lt;&gt;&quot;&quot;;[.C186]*[.$D$11];&quot;&quot;)">
            <text:p/>
          </table:table-cell>
          <table:table-cell table:style-name="ce393" table:formula="of:=+IF([.$B187]&lt;&gt;&quot;&quot;;[.D187]-[.E187];&quot;&quot;)">
            <text:p/>
          </table:table-cell>
          <table:table-cell table:style-name="ce409" table:formula="of:=+IF([.$C187]&lt;&gt;&quot;&quot;;[.D18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7]+1)&gt;N;&quot;&quot;;([.B187]+1));&quot;&quot;)">
            <text:p/>
          </table:table-cell>
          <table:table-cell table:style-name="ce393" table:formula="of:=+IF([.$B188]&lt;&gt;&quot;&quot;;[.C187]-[.F188];&quot;&quot;)">
            <text:p/>
          </table:table-cell>
          <table:table-cell table:style-name="ce393" table:formula="of:=+IF([.$B188]&lt;&gt;&quot;&quot;;A;&quot;&quot;)">
            <text:p/>
          </table:table-cell>
          <table:table-cell table:style-name="ce393" table:formula="of:=+IF([.$B188]&lt;&gt;&quot;&quot;;[.C187]*[.$D$11];&quot;&quot;)">
            <text:p/>
          </table:table-cell>
          <table:table-cell table:style-name="ce393" table:formula="of:=+IF([.$B188]&lt;&gt;&quot;&quot;;[.D188]-[.E188];&quot;&quot;)">
            <text:p/>
          </table:table-cell>
          <table:table-cell table:style-name="ce409" table:formula="of:=+IF([.$C188]&lt;&gt;&quot;&quot;;[.D18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8]+1)&gt;N;&quot;&quot;;([.B188]+1));&quot;&quot;)">
            <text:p/>
          </table:table-cell>
          <table:table-cell table:style-name="ce393" table:formula="of:=+IF([.$B189]&lt;&gt;&quot;&quot;;[.C188]-[.F189];&quot;&quot;)">
            <text:p/>
          </table:table-cell>
          <table:table-cell table:style-name="ce393" table:formula="of:=+IF([.$B189]&lt;&gt;&quot;&quot;;A;&quot;&quot;)">
            <text:p/>
          </table:table-cell>
          <table:table-cell table:style-name="ce393" table:formula="of:=+IF([.$B189]&lt;&gt;&quot;&quot;;[.C188]*[.$D$11];&quot;&quot;)">
            <text:p/>
          </table:table-cell>
          <table:table-cell table:style-name="ce393" table:formula="of:=+IF([.$B189]&lt;&gt;&quot;&quot;;[.D189]-[.E189];&quot;&quot;)">
            <text:p/>
          </table:table-cell>
          <table:table-cell table:style-name="ce409" table:formula="of:=+IF([.$C189]&lt;&gt;&quot;&quot;;[.D18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89]+1)&gt;N;&quot;&quot;;([.B189]+1));&quot;&quot;)">
            <text:p/>
          </table:table-cell>
          <table:table-cell table:style-name="ce393" table:formula="of:=+IF([.$B190]&lt;&gt;&quot;&quot;;[.C189]-[.F190];&quot;&quot;)">
            <text:p/>
          </table:table-cell>
          <table:table-cell table:style-name="ce393" table:formula="of:=+IF([.$B190]&lt;&gt;&quot;&quot;;A;&quot;&quot;)">
            <text:p/>
          </table:table-cell>
          <table:table-cell table:style-name="ce393" table:formula="of:=+IF([.$B190]&lt;&gt;&quot;&quot;;[.C189]*[.$D$11];&quot;&quot;)">
            <text:p/>
          </table:table-cell>
          <table:table-cell table:style-name="ce393" table:formula="of:=+IF([.$B190]&lt;&gt;&quot;&quot;;[.D190]-[.E190];&quot;&quot;)">
            <text:p/>
          </table:table-cell>
          <table:table-cell table:style-name="ce409" table:formula="of:=+IF([.$C190]&lt;&gt;&quot;&quot;;[.D19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0]+1)&gt;N;&quot;&quot;;([.B190]+1));&quot;&quot;)">
            <text:p/>
          </table:table-cell>
          <table:table-cell table:style-name="ce393" table:formula="of:=+IF([.$B191]&lt;&gt;&quot;&quot;;[.C190]-[.F191];&quot;&quot;)">
            <text:p/>
          </table:table-cell>
          <table:table-cell table:style-name="ce393" table:formula="of:=+IF([.$B191]&lt;&gt;&quot;&quot;;A;&quot;&quot;)">
            <text:p/>
          </table:table-cell>
          <table:table-cell table:style-name="ce393" table:formula="of:=+IF([.$B191]&lt;&gt;&quot;&quot;;[.C190]*[.$D$11];&quot;&quot;)">
            <text:p/>
          </table:table-cell>
          <table:table-cell table:style-name="ce393" table:formula="of:=+IF([.$B191]&lt;&gt;&quot;&quot;;[.D191]-[.E191];&quot;&quot;)">
            <text:p/>
          </table:table-cell>
          <table:table-cell table:style-name="ce409" table:formula="of:=+IF([.$C191]&lt;&gt;&quot;&quot;;[.D19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1]+1)&gt;N;&quot;&quot;;([.B191]+1));&quot;&quot;)">
            <text:p/>
          </table:table-cell>
          <table:table-cell table:style-name="ce393" table:formula="of:=+IF([.$B192]&lt;&gt;&quot;&quot;;[.C191]-[.F192];&quot;&quot;)">
            <text:p/>
          </table:table-cell>
          <table:table-cell table:style-name="ce393" table:formula="of:=+IF([.$B192]&lt;&gt;&quot;&quot;;A;&quot;&quot;)">
            <text:p/>
          </table:table-cell>
          <table:table-cell table:style-name="ce393" table:formula="of:=+IF([.$B192]&lt;&gt;&quot;&quot;;[.C191]*[.$D$11];&quot;&quot;)">
            <text:p/>
          </table:table-cell>
          <table:table-cell table:style-name="ce393" table:formula="of:=+IF([.$B192]&lt;&gt;&quot;&quot;;[.D192]-[.E192];&quot;&quot;)">
            <text:p/>
          </table:table-cell>
          <table:table-cell table:style-name="ce409" table:formula="of:=+IF([.$C192]&lt;&gt;&quot;&quot;;[.D19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2]+1)&gt;N;&quot;&quot;;([.B192]+1));&quot;&quot;)">
            <text:p/>
          </table:table-cell>
          <table:table-cell table:style-name="ce393" table:formula="of:=+IF([.$B193]&lt;&gt;&quot;&quot;;[.C192]-[.F193];&quot;&quot;)">
            <text:p/>
          </table:table-cell>
          <table:table-cell table:style-name="ce393" table:formula="of:=+IF([.$B193]&lt;&gt;&quot;&quot;;A;&quot;&quot;)">
            <text:p/>
          </table:table-cell>
          <table:table-cell table:style-name="ce393" table:formula="of:=+IF([.$B193]&lt;&gt;&quot;&quot;;[.C192]*[.$D$11];&quot;&quot;)">
            <text:p/>
          </table:table-cell>
          <table:table-cell table:style-name="ce393" table:formula="of:=+IF([.$B193]&lt;&gt;&quot;&quot;;[.D193]-[.E193];&quot;&quot;)">
            <text:p/>
          </table:table-cell>
          <table:table-cell table:style-name="ce409" table:formula="of:=+IF([.$C193]&lt;&gt;&quot;&quot;;[.D19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3]+1)&gt;N;&quot;&quot;;([.B193]+1));&quot;&quot;)">
            <text:p/>
          </table:table-cell>
          <table:table-cell table:style-name="ce393" table:formula="of:=+IF([.$B194]&lt;&gt;&quot;&quot;;[.C193]-[.F194];&quot;&quot;)">
            <text:p/>
          </table:table-cell>
          <table:table-cell table:style-name="ce393" table:formula="of:=+IF([.$B194]&lt;&gt;&quot;&quot;;A;&quot;&quot;)">
            <text:p/>
          </table:table-cell>
          <table:table-cell table:style-name="ce393" table:formula="of:=+IF([.$B194]&lt;&gt;&quot;&quot;;[.C193]*[.$D$11];&quot;&quot;)">
            <text:p/>
          </table:table-cell>
          <table:table-cell table:style-name="ce393" table:formula="of:=+IF([.$B194]&lt;&gt;&quot;&quot;;[.D194]-[.E194];&quot;&quot;)">
            <text:p/>
          </table:table-cell>
          <table:table-cell table:style-name="ce409" table:formula="of:=+IF([.$C194]&lt;&gt;&quot;&quot;;[.D19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4]+1)&gt;N;&quot;&quot;;([.B194]+1));&quot;&quot;)">
            <text:p/>
          </table:table-cell>
          <table:table-cell table:style-name="ce393" table:formula="of:=+IF([.$B195]&lt;&gt;&quot;&quot;;[.C194]-[.F195];&quot;&quot;)">
            <text:p/>
          </table:table-cell>
          <table:table-cell table:style-name="ce393" table:formula="of:=+IF([.$B195]&lt;&gt;&quot;&quot;;A;&quot;&quot;)">
            <text:p/>
          </table:table-cell>
          <table:table-cell table:style-name="ce393" table:formula="of:=+IF([.$B195]&lt;&gt;&quot;&quot;;[.C194]*[.$D$11];&quot;&quot;)">
            <text:p/>
          </table:table-cell>
          <table:table-cell table:style-name="ce393" table:formula="of:=+IF([.$B195]&lt;&gt;&quot;&quot;;[.D195]-[.E195];&quot;&quot;)">
            <text:p/>
          </table:table-cell>
          <table:table-cell table:style-name="ce409" table:formula="of:=+IF([.$C195]&lt;&gt;&quot;&quot;;[.D19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5]+1)&gt;N;&quot;&quot;;([.B195]+1));&quot;&quot;)">
            <text:p/>
          </table:table-cell>
          <table:table-cell table:style-name="ce393" table:formula="of:=+IF([.$B196]&lt;&gt;&quot;&quot;;[.C195]-[.F196];&quot;&quot;)">
            <text:p/>
          </table:table-cell>
          <table:table-cell table:style-name="ce393" table:formula="of:=+IF([.$B196]&lt;&gt;&quot;&quot;;A;&quot;&quot;)">
            <text:p/>
          </table:table-cell>
          <table:table-cell table:style-name="ce393" table:formula="of:=+IF([.$B196]&lt;&gt;&quot;&quot;;[.C195]*[.$D$11];&quot;&quot;)">
            <text:p/>
          </table:table-cell>
          <table:table-cell table:style-name="ce393" table:formula="of:=+IF([.$B196]&lt;&gt;&quot;&quot;;[.D196]-[.E196];&quot;&quot;)">
            <text:p/>
          </table:table-cell>
          <table:table-cell table:style-name="ce409" table:formula="of:=+IF([.$C196]&lt;&gt;&quot;&quot;;[.D19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6]+1)&gt;N;&quot;&quot;;([.B196]+1));&quot;&quot;)">
            <text:p/>
          </table:table-cell>
          <table:table-cell table:style-name="ce393" table:formula="of:=+IF([.$B197]&lt;&gt;&quot;&quot;;[.C196]-[.F197];&quot;&quot;)">
            <text:p/>
          </table:table-cell>
          <table:table-cell table:style-name="ce393" table:formula="of:=+IF([.$B197]&lt;&gt;&quot;&quot;;A;&quot;&quot;)">
            <text:p/>
          </table:table-cell>
          <table:table-cell table:style-name="ce393" table:formula="of:=+IF([.$B197]&lt;&gt;&quot;&quot;;[.C196]*[.$D$11];&quot;&quot;)">
            <text:p/>
          </table:table-cell>
          <table:table-cell table:style-name="ce393" table:formula="of:=+IF([.$B197]&lt;&gt;&quot;&quot;;[.D197]-[.E197];&quot;&quot;)">
            <text:p/>
          </table:table-cell>
          <table:table-cell table:style-name="ce409" table:formula="of:=+IF([.$C197]&lt;&gt;&quot;&quot;;[.D19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7]+1)&gt;N;&quot;&quot;;([.B197]+1));&quot;&quot;)">
            <text:p/>
          </table:table-cell>
          <table:table-cell table:style-name="ce393" table:formula="of:=+IF([.$B198]&lt;&gt;&quot;&quot;;[.C197]-[.F198];&quot;&quot;)">
            <text:p/>
          </table:table-cell>
          <table:table-cell table:style-name="ce393" table:formula="of:=+IF([.$B198]&lt;&gt;&quot;&quot;;A;&quot;&quot;)">
            <text:p/>
          </table:table-cell>
          <table:table-cell table:style-name="ce393" table:formula="of:=+IF([.$B198]&lt;&gt;&quot;&quot;;[.C197]*[.$D$11];&quot;&quot;)">
            <text:p/>
          </table:table-cell>
          <table:table-cell table:style-name="ce393" table:formula="of:=+IF([.$B198]&lt;&gt;&quot;&quot;;[.D198]-[.E198];&quot;&quot;)">
            <text:p/>
          </table:table-cell>
          <table:table-cell table:style-name="ce409" table:formula="of:=+IF([.$C198]&lt;&gt;&quot;&quot;;[.D19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8]+1)&gt;N;&quot;&quot;;([.B198]+1));&quot;&quot;)">
            <text:p/>
          </table:table-cell>
          <table:table-cell table:style-name="ce393" table:formula="of:=+IF([.$B199]&lt;&gt;&quot;&quot;;[.C198]-[.F199];&quot;&quot;)">
            <text:p/>
          </table:table-cell>
          <table:table-cell table:style-name="ce393" table:formula="of:=+IF([.$B199]&lt;&gt;&quot;&quot;;A;&quot;&quot;)">
            <text:p/>
          </table:table-cell>
          <table:table-cell table:style-name="ce393" table:formula="of:=+IF([.$B199]&lt;&gt;&quot;&quot;;[.C198]*[.$D$11];&quot;&quot;)">
            <text:p/>
          </table:table-cell>
          <table:table-cell table:style-name="ce393" table:formula="of:=+IF([.$B199]&lt;&gt;&quot;&quot;;[.D199]-[.E199];&quot;&quot;)">
            <text:p/>
          </table:table-cell>
          <table:table-cell table:style-name="ce409" table:formula="of:=+IF([.$C199]&lt;&gt;&quot;&quot;;[.D19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199]+1)&gt;N;&quot;&quot;;([.B199]+1));&quot;&quot;)">
            <text:p/>
          </table:table-cell>
          <table:table-cell table:style-name="ce393" table:formula="of:=+IF([.$B200]&lt;&gt;&quot;&quot;;[.C199]-[.F200];&quot;&quot;)">
            <text:p/>
          </table:table-cell>
          <table:table-cell table:style-name="ce393" table:formula="of:=+IF([.$B200]&lt;&gt;&quot;&quot;;A;&quot;&quot;)">
            <text:p/>
          </table:table-cell>
          <table:table-cell table:style-name="ce393" table:formula="of:=+IF([.$B200]&lt;&gt;&quot;&quot;;[.C199]*[.$D$11];&quot;&quot;)">
            <text:p/>
          </table:table-cell>
          <table:table-cell table:style-name="ce393" table:formula="of:=+IF([.$B200]&lt;&gt;&quot;&quot;;[.D200]-[.E200];&quot;&quot;)">
            <text:p/>
          </table:table-cell>
          <table:table-cell table:style-name="ce409" table:formula="of:=+IF([.$C200]&lt;&gt;&quot;&quot;;[.D20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0]+1)&gt;N;&quot;&quot;;([.B200]+1));&quot;&quot;)">
            <text:p/>
          </table:table-cell>
          <table:table-cell table:style-name="ce393" table:formula="of:=+IF([.$B201]&lt;&gt;&quot;&quot;;[.C200]-[.F201];&quot;&quot;)">
            <text:p/>
          </table:table-cell>
          <table:table-cell table:style-name="ce393" table:formula="of:=+IF([.$B201]&lt;&gt;&quot;&quot;;A;&quot;&quot;)">
            <text:p/>
          </table:table-cell>
          <table:table-cell table:style-name="ce393" table:formula="of:=+IF([.$B201]&lt;&gt;&quot;&quot;;[.C200]*[.$D$11];&quot;&quot;)">
            <text:p/>
          </table:table-cell>
          <table:table-cell table:style-name="ce393" table:formula="of:=+IF([.$B201]&lt;&gt;&quot;&quot;;[.D201]-[.E201];&quot;&quot;)">
            <text:p/>
          </table:table-cell>
          <table:table-cell table:style-name="ce409" table:formula="of:=+IF([.$C201]&lt;&gt;&quot;&quot;;[.D20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1]+1)&gt;N;&quot;&quot;;([.B201]+1));&quot;&quot;)">
            <text:p/>
          </table:table-cell>
          <table:table-cell table:style-name="ce393" table:formula="of:=+IF([.$B202]&lt;&gt;&quot;&quot;;[.C201]-[.F202];&quot;&quot;)">
            <text:p/>
          </table:table-cell>
          <table:table-cell table:style-name="ce393" table:formula="of:=+IF([.$B202]&lt;&gt;&quot;&quot;;A;&quot;&quot;)">
            <text:p/>
          </table:table-cell>
          <table:table-cell table:style-name="ce393" table:formula="of:=+IF([.$B202]&lt;&gt;&quot;&quot;;[.C201]*[.$D$11];&quot;&quot;)">
            <text:p/>
          </table:table-cell>
          <table:table-cell table:style-name="ce393" table:formula="of:=+IF([.$B202]&lt;&gt;&quot;&quot;;[.D202]-[.E202];&quot;&quot;)">
            <text:p/>
          </table:table-cell>
          <table:table-cell table:style-name="ce409" table:formula="of:=+IF([.$C202]&lt;&gt;&quot;&quot;;[.D20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2]+1)&gt;N;&quot;&quot;;([.B202]+1));&quot;&quot;)">
            <text:p/>
          </table:table-cell>
          <table:table-cell table:style-name="ce393" table:formula="of:=+IF([.$B203]&lt;&gt;&quot;&quot;;[.C202]-[.F203];&quot;&quot;)">
            <text:p/>
          </table:table-cell>
          <table:table-cell table:style-name="ce393" table:formula="of:=+IF([.$B203]&lt;&gt;&quot;&quot;;A;&quot;&quot;)">
            <text:p/>
          </table:table-cell>
          <table:table-cell table:style-name="ce393" table:formula="of:=+IF([.$B203]&lt;&gt;&quot;&quot;;[.C202]*[.$D$11];&quot;&quot;)">
            <text:p/>
          </table:table-cell>
          <table:table-cell table:style-name="ce393" table:formula="of:=+IF([.$B203]&lt;&gt;&quot;&quot;;[.D203]-[.E203];&quot;&quot;)">
            <text:p/>
          </table:table-cell>
          <table:table-cell table:style-name="ce409" table:formula="of:=+IF([.$C203]&lt;&gt;&quot;&quot;;[.D20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3]+1)&gt;N;&quot;&quot;;([.B203]+1));&quot;&quot;)">
            <text:p/>
          </table:table-cell>
          <table:table-cell table:style-name="ce393" table:formula="of:=+IF([.$B204]&lt;&gt;&quot;&quot;;[.C203]-[.F204];&quot;&quot;)">
            <text:p/>
          </table:table-cell>
          <table:table-cell table:style-name="ce393" table:formula="of:=+IF([.$B204]&lt;&gt;&quot;&quot;;A;&quot;&quot;)">
            <text:p/>
          </table:table-cell>
          <table:table-cell table:style-name="ce393" table:formula="of:=+IF([.$B204]&lt;&gt;&quot;&quot;;[.C203]*[.$D$11];&quot;&quot;)">
            <text:p/>
          </table:table-cell>
          <table:table-cell table:style-name="ce393" table:formula="of:=+IF([.$B204]&lt;&gt;&quot;&quot;;[.D204]-[.E204];&quot;&quot;)">
            <text:p/>
          </table:table-cell>
          <table:table-cell table:style-name="ce409" table:formula="of:=+IF([.$C204]&lt;&gt;&quot;&quot;;[.D20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4]+1)&gt;N;&quot;&quot;;([.B204]+1));&quot;&quot;)">
            <text:p/>
          </table:table-cell>
          <table:table-cell table:style-name="ce393" table:formula="of:=+IF([.$B205]&lt;&gt;&quot;&quot;;[.C204]-[.F205];&quot;&quot;)">
            <text:p/>
          </table:table-cell>
          <table:table-cell table:style-name="ce393" table:formula="of:=+IF([.$B205]&lt;&gt;&quot;&quot;;A;&quot;&quot;)">
            <text:p/>
          </table:table-cell>
          <table:table-cell table:style-name="ce393" table:formula="of:=+IF([.$B205]&lt;&gt;&quot;&quot;;[.C204]*[.$D$11];&quot;&quot;)">
            <text:p/>
          </table:table-cell>
          <table:table-cell table:style-name="ce393" table:formula="of:=+IF([.$B205]&lt;&gt;&quot;&quot;;[.D205]-[.E205];&quot;&quot;)">
            <text:p/>
          </table:table-cell>
          <table:table-cell table:style-name="ce409" table:formula="of:=+IF([.$C205]&lt;&gt;&quot;&quot;;[.D20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5]+1)&gt;N;&quot;&quot;;([.B205]+1));&quot;&quot;)">
            <text:p/>
          </table:table-cell>
          <table:table-cell table:style-name="ce393" table:formula="of:=+IF([.$B206]&lt;&gt;&quot;&quot;;[.C205]-[.F206];&quot;&quot;)">
            <text:p/>
          </table:table-cell>
          <table:table-cell table:style-name="ce393" table:formula="of:=+IF([.$B206]&lt;&gt;&quot;&quot;;A;&quot;&quot;)">
            <text:p/>
          </table:table-cell>
          <table:table-cell table:style-name="ce393" table:formula="of:=+IF([.$B206]&lt;&gt;&quot;&quot;;[.C205]*[.$D$11];&quot;&quot;)">
            <text:p/>
          </table:table-cell>
          <table:table-cell table:style-name="ce393" table:formula="of:=+IF([.$B206]&lt;&gt;&quot;&quot;;[.D206]-[.E206];&quot;&quot;)">
            <text:p/>
          </table:table-cell>
          <table:table-cell table:style-name="ce409" table:formula="of:=+IF([.$C206]&lt;&gt;&quot;&quot;;[.D20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6]+1)&gt;N;&quot;&quot;;([.B206]+1));&quot;&quot;)">
            <text:p/>
          </table:table-cell>
          <table:table-cell table:style-name="ce393" table:formula="of:=+IF([.$B207]&lt;&gt;&quot;&quot;;[.C206]-[.F207];&quot;&quot;)">
            <text:p/>
          </table:table-cell>
          <table:table-cell table:style-name="ce393" table:formula="of:=+IF([.$B207]&lt;&gt;&quot;&quot;;A;&quot;&quot;)">
            <text:p/>
          </table:table-cell>
          <table:table-cell table:style-name="ce393" table:formula="of:=+IF([.$B207]&lt;&gt;&quot;&quot;;[.C206]*[.$D$11];&quot;&quot;)">
            <text:p/>
          </table:table-cell>
          <table:table-cell table:style-name="ce393" table:formula="of:=+IF([.$B207]&lt;&gt;&quot;&quot;;[.D207]-[.E207];&quot;&quot;)">
            <text:p/>
          </table:table-cell>
          <table:table-cell table:style-name="ce409" table:formula="of:=+IF([.$C207]&lt;&gt;&quot;&quot;;[.D20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7]+1)&gt;N;&quot;&quot;;([.B207]+1));&quot;&quot;)">
            <text:p/>
          </table:table-cell>
          <table:table-cell table:style-name="ce393" table:formula="of:=+IF([.$B208]&lt;&gt;&quot;&quot;;[.C207]-[.F208];&quot;&quot;)">
            <text:p/>
          </table:table-cell>
          <table:table-cell table:style-name="ce393" table:formula="of:=+IF([.$B208]&lt;&gt;&quot;&quot;;A;&quot;&quot;)">
            <text:p/>
          </table:table-cell>
          <table:table-cell table:style-name="ce393" table:formula="of:=+IF([.$B208]&lt;&gt;&quot;&quot;;[.C207]*[.$D$11];&quot;&quot;)">
            <text:p/>
          </table:table-cell>
          <table:table-cell table:style-name="ce393" table:formula="of:=+IF([.$B208]&lt;&gt;&quot;&quot;;[.D208]-[.E208];&quot;&quot;)">
            <text:p/>
          </table:table-cell>
          <table:table-cell table:style-name="ce409" table:formula="of:=+IF([.$C208]&lt;&gt;&quot;&quot;;[.D20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8]+1)&gt;N;&quot;&quot;;([.B208]+1));&quot;&quot;)">
            <text:p/>
          </table:table-cell>
          <table:table-cell table:style-name="ce393" table:formula="of:=+IF([.$B209]&lt;&gt;&quot;&quot;;[.C208]-[.F209];&quot;&quot;)">
            <text:p/>
          </table:table-cell>
          <table:table-cell table:style-name="ce393" table:formula="of:=+IF([.$B209]&lt;&gt;&quot;&quot;;A;&quot;&quot;)">
            <text:p/>
          </table:table-cell>
          <table:table-cell table:style-name="ce393" table:formula="of:=+IF([.$B209]&lt;&gt;&quot;&quot;;[.C208]*[.$D$11];&quot;&quot;)">
            <text:p/>
          </table:table-cell>
          <table:table-cell table:style-name="ce393" table:formula="of:=+IF([.$B209]&lt;&gt;&quot;&quot;;[.D209]-[.E209];&quot;&quot;)">
            <text:p/>
          </table:table-cell>
          <table:table-cell table:style-name="ce409" table:formula="of:=+IF([.$C209]&lt;&gt;&quot;&quot;;[.D20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09]+1)&gt;N;&quot;&quot;;([.B209]+1));&quot;&quot;)">
            <text:p/>
          </table:table-cell>
          <table:table-cell table:style-name="ce393" table:formula="of:=+IF([.$B210]&lt;&gt;&quot;&quot;;[.C209]-[.F210];&quot;&quot;)">
            <text:p/>
          </table:table-cell>
          <table:table-cell table:style-name="ce393" table:formula="of:=+IF([.$B210]&lt;&gt;&quot;&quot;;A;&quot;&quot;)">
            <text:p/>
          </table:table-cell>
          <table:table-cell table:style-name="ce393" table:formula="of:=+IF([.$B210]&lt;&gt;&quot;&quot;;[.C209]*[.$D$11];&quot;&quot;)">
            <text:p/>
          </table:table-cell>
          <table:table-cell table:style-name="ce393" table:formula="of:=+IF([.$B210]&lt;&gt;&quot;&quot;;[.D210]-[.E210];&quot;&quot;)">
            <text:p/>
          </table:table-cell>
          <table:table-cell table:style-name="ce409" table:formula="of:=+IF([.$C210]&lt;&gt;&quot;&quot;;[.D21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0]+1)&gt;N;&quot;&quot;;([.B210]+1));&quot;&quot;)">
            <text:p/>
          </table:table-cell>
          <table:table-cell table:style-name="ce393" table:formula="of:=+IF([.$B211]&lt;&gt;&quot;&quot;;[.C210]-[.F211];&quot;&quot;)">
            <text:p/>
          </table:table-cell>
          <table:table-cell table:style-name="ce393" table:formula="of:=+IF([.$B211]&lt;&gt;&quot;&quot;;A;&quot;&quot;)">
            <text:p/>
          </table:table-cell>
          <table:table-cell table:style-name="ce393" table:formula="of:=+IF([.$B211]&lt;&gt;&quot;&quot;;[.C210]*[.$D$11];&quot;&quot;)">
            <text:p/>
          </table:table-cell>
          <table:table-cell table:style-name="ce393" table:formula="of:=+IF([.$B211]&lt;&gt;&quot;&quot;;[.D211]-[.E211];&quot;&quot;)">
            <text:p/>
          </table:table-cell>
          <table:table-cell table:style-name="ce409" table:formula="of:=+IF([.$C211]&lt;&gt;&quot;&quot;;[.D21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1]+1)&gt;N;&quot;&quot;;([.B211]+1));&quot;&quot;)">
            <text:p/>
          </table:table-cell>
          <table:table-cell table:style-name="ce393" table:formula="of:=+IF([.$B212]&lt;&gt;&quot;&quot;;[.C211]-[.F212];&quot;&quot;)">
            <text:p/>
          </table:table-cell>
          <table:table-cell table:style-name="ce393" table:formula="of:=+IF([.$B212]&lt;&gt;&quot;&quot;;A;&quot;&quot;)">
            <text:p/>
          </table:table-cell>
          <table:table-cell table:style-name="ce393" table:formula="of:=+IF([.$B212]&lt;&gt;&quot;&quot;;[.C211]*[.$D$11];&quot;&quot;)">
            <text:p/>
          </table:table-cell>
          <table:table-cell table:style-name="ce393" table:formula="of:=+IF([.$B212]&lt;&gt;&quot;&quot;;[.D212]-[.E212];&quot;&quot;)">
            <text:p/>
          </table:table-cell>
          <table:table-cell table:style-name="ce409" table:formula="of:=+IF([.$C212]&lt;&gt;&quot;&quot;;[.D21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2]+1)&gt;N;&quot;&quot;;([.B212]+1));&quot;&quot;)">
            <text:p/>
          </table:table-cell>
          <table:table-cell table:style-name="ce393" table:formula="of:=+IF([.$B213]&lt;&gt;&quot;&quot;;[.C212]-[.F213];&quot;&quot;)">
            <text:p/>
          </table:table-cell>
          <table:table-cell table:style-name="ce393" table:formula="of:=+IF([.$B213]&lt;&gt;&quot;&quot;;A;&quot;&quot;)">
            <text:p/>
          </table:table-cell>
          <table:table-cell table:style-name="ce393" table:formula="of:=+IF([.$B213]&lt;&gt;&quot;&quot;;[.C212]*[.$D$11];&quot;&quot;)">
            <text:p/>
          </table:table-cell>
          <table:table-cell table:style-name="ce393" table:formula="of:=+IF([.$B213]&lt;&gt;&quot;&quot;;[.D213]-[.E213];&quot;&quot;)">
            <text:p/>
          </table:table-cell>
          <table:table-cell table:style-name="ce409" table:formula="of:=+IF([.$C213]&lt;&gt;&quot;&quot;;[.D21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3]+1)&gt;N;&quot;&quot;;([.B213]+1));&quot;&quot;)">
            <text:p/>
          </table:table-cell>
          <table:table-cell table:style-name="ce393" table:formula="of:=+IF([.$B214]&lt;&gt;&quot;&quot;;[.C213]-[.F214];&quot;&quot;)">
            <text:p/>
          </table:table-cell>
          <table:table-cell table:style-name="ce393" table:formula="of:=+IF([.$B214]&lt;&gt;&quot;&quot;;A;&quot;&quot;)">
            <text:p/>
          </table:table-cell>
          <table:table-cell table:style-name="ce393" table:formula="of:=+IF([.$B214]&lt;&gt;&quot;&quot;;[.C213]*[.$D$11];&quot;&quot;)">
            <text:p/>
          </table:table-cell>
          <table:table-cell table:style-name="ce393" table:formula="of:=+IF([.$B214]&lt;&gt;&quot;&quot;;[.D214]-[.E214];&quot;&quot;)">
            <text:p/>
          </table:table-cell>
          <table:table-cell table:style-name="ce409" table:formula="of:=+IF([.$C214]&lt;&gt;&quot;&quot;;[.D21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4]+1)&gt;N;&quot;&quot;;([.B214]+1));&quot;&quot;)">
            <text:p/>
          </table:table-cell>
          <table:table-cell table:style-name="ce393" table:formula="of:=+IF([.$B215]&lt;&gt;&quot;&quot;;[.C214]-[.F215];&quot;&quot;)">
            <text:p/>
          </table:table-cell>
          <table:table-cell table:style-name="ce393" table:formula="of:=+IF([.$B215]&lt;&gt;&quot;&quot;;A;&quot;&quot;)">
            <text:p/>
          </table:table-cell>
          <table:table-cell table:style-name="ce393" table:formula="of:=+IF([.$B215]&lt;&gt;&quot;&quot;;[.C214]*[.$D$11];&quot;&quot;)">
            <text:p/>
          </table:table-cell>
          <table:table-cell table:style-name="ce393" table:formula="of:=+IF([.$B215]&lt;&gt;&quot;&quot;;[.D215]-[.E215];&quot;&quot;)">
            <text:p/>
          </table:table-cell>
          <table:table-cell table:style-name="ce409" table:formula="of:=+IF([.$C215]&lt;&gt;&quot;&quot;;[.D21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5]+1)&gt;N;&quot;&quot;;([.B215]+1));&quot;&quot;)">
            <text:p/>
          </table:table-cell>
          <table:table-cell table:style-name="ce393" table:formula="of:=+IF([.$B216]&lt;&gt;&quot;&quot;;[.C215]-[.F216];&quot;&quot;)">
            <text:p/>
          </table:table-cell>
          <table:table-cell table:style-name="ce393" table:formula="of:=+IF([.$B216]&lt;&gt;&quot;&quot;;A;&quot;&quot;)">
            <text:p/>
          </table:table-cell>
          <table:table-cell table:style-name="ce393" table:formula="of:=+IF([.$B216]&lt;&gt;&quot;&quot;;[.C215]*[.$D$11];&quot;&quot;)">
            <text:p/>
          </table:table-cell>
          <table:table-cell table:style-name="ce393" table:formula="of:=+IF([.$B216]&lt;&gt;&quot;&quot;;[.D216]-[.E216];&quot;&quot;)">
            <text:p/>
          </table:table-cell>
          <table:table-cell table:style-name="ce409" table:formula="of:=+IF([.$C216]&lt;&gt;&quot;&quot;;[.D21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6]+1)&gt;N;&quot;&quot;;([.B216]+1));&quot;&quot;)">
            <text:p/>
          </table:table-cell>
          <table:table-cell table:style-name="ce393" table:formula="of:=+IF([.$B217]&lt;&gt;&quot;&quot;;[.C216]-[.F217];&quot;&quot;)">
            <text:p/>
          </table:table-cell>
          <table:table-cell table:style-name="ce393" table:formula="of:=+IF([.$B217]&lt;&gt;&quot;&quot;;A;&quot;&quot;)">
            <text:p/>
          </table:table-cell>
          <table:table-cell table:style-name="ce393" table:formula="of:=+IF([.$B217]&lt;&gt;&quot;&quot;;[.C216]*[.$D$11];&quot;&quot;)">
            <text:p/>
          </table:table-cell>
          <table:table-cell table:style-name="ce393" table:formula="of:=+IF([.$B217]&lt;&gt;&quot;&quot;;[.D217]-[.E217];&quot;&quot;)">
            <text:p/>
          </table:table-cell>
          <table:table-cell table:style-name="ce409" table:formula="of:=+IF([.$C217]&lt;&gt;&quot;&quot;;[.D21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7]+1)&gt;N;&quot;&quot;;([.B217]+1));&quot;&quot;)">
            <text:p/>
          </table:table-cell>
          <table:table-cell table:style-name="ce393" table:formula="of:=+IF([.$B218]&lt;&gt;&quot;&quot;;[.C217]-[.F218];&quot;&quot;)">
            <text:p/>
          </table:table-cell>
          <table:table-cell table:style-name="ce393" table:formula="of:=+IF([.$B218]&lt;&gt;&quot;&quot;;A;&quot;&quot;)">
            <text:p/>
          </table:table-cell>
          <table:table-cell table:style-name="ce393" table:formula="of:=+IF([.$B218]&lt;&gt;&quot;&quot;;[.C217]*[.$D$11];&quot;&quot;)">
            <text:p/>
          </table:table-cell>
          <table:table-cell table:style-name="ce393" table:formula="of:=+IF([.$B218]&lt;&gt;&quot;&quot;;[.D218]-[.E218];&quot;&quot;)">
            <text:p/>
          </table:table-cell>
          <table:table-cell table:style-name="ce409" table:formula="of:=+IF([.$C218]&lt;&gt;&quot;&quot;;[.D21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8]+1)&gt;N;&quot;&quot;;([.B218]+1));&quot;&quot;)">
            <text:p/>
          </table:table-cell>
          <table:table-cell table:style-name="ce393" table:formula="of:=+IF([.$B219]&lt;&gt;&quot;&quot;;[.C218]-[.F219];&quot;&quot;)">
            <text:p/>
          </table:table-cell>
          <table:table-cell table:style-name="ce393" table:formula="of:=+IF([.$B219]&lt;&gt;&quot;&quot;;A;&quot;&quot;)">
            <text:p/>
          </table:table-cell>
          <table:table-cell table:style-name="ce393" table:formula="of:=+IF([.$B219]&lt;&gt;&quot;&quot;;[.C218]*[.$D$11];&quot;&quot;)">
            <text:p/>
          </table:table-cell>
          <table:table-cell table:style-name="ce393" table:formula="of:=+IF([.$B219]&lt;&gt;&quot;&quot;;[.D219]-[.E219];&quot;&quot;)">
            <text:p/>
          </table:table-cell>
          <table:table-cell table:style-name="ce409" table:formula="of:=+IF([.$C219]&lt;&gt;&quot;&quot;;[.D21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19]+1)&gt;N;&quot;&quot;;([.B219]+1));&quot;&quot;)">
            <text:p/>
          </table:table-cell>
          <table:table-cell table:style-name="ce393" table:formula="of:=+IF([.$B220]&lt;&gt;&quot;&quot;;[.C219]-[.F220];&quot;&quot;)">
            <text:p/>
          </table:table-cell>
          <table:table-cell table:style-name="ce393" table:formula="of:=+IF([.$B220]&lt;&gt;&quot;&quot;;A;&quot;&quot;)">
            <text:p/>
          </table:table-cell>
          <table:table-cell table:style-name="ce393" table:formula="of:=+IF([.$B220]&lt;&gt;&quot;&quot;;[.C219]*[.$D$11];&quot;&quot;)">
            <text:p/>
          </table:table-cell>
          <table:table-cell table:style-name="ce393" table:formula="of:=+IF([.$B220]&lt;&gt;&quot;&quot;;[.D220]-[.E220];&quot;&quot;)">
            <text:p/>
          </table:table-cell>
          <table:table-cell table:style-name="ce409" table:formula="of:=+IF([.$C220]&lt;&gt;&quot;&quot;;[.D22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0]+1)&gt;N;&quot;&quot;;([.B220]+1));&quot;&quot;)">
            <text:p/>
          </table:table-cell>
          <table:table-cell table:style-name="ce393" table:formula="of:=+IF([.$B221]&lt;&gt;&quot;&quot;;[.C220]-[.F221];&quot;&quot;)">
            <text:p/>
          </table:table-cell>
          <table:table-cell table:style-name="ce393" table:formula="of:=+IF([.$B221]&lt;&gt;&quot;&quot;;A;&quot;&quot;)">
            <text:p/>
          </table:table-cell>
          <table:table-cell table:style-name="ce393" table:formula="of:=+IF([.$B221]&lt;&gt;&quot;&quot;;[.C220]*[.$D$11];&quot;&quot;)">
            <text:p/>
          </table:table-cell>
          <table:table-cell table:style-name="ce393" table:formula="of:=+IF([.$B221]&lt;&gt;&quot;&quot;;[.D221]-[.E221];&quot;&quot;)">
            <text:p/>
          </table:table-cell>
          <table:table-cell table:style-name="ce409" table:formula="of:=+IF([.$C221]&lt;&gt;&quot;&quot;;[.D22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1]+1)&gt;N;&quot;&quot;;([.B221]+1));&quot;&quot;)">
            <text:p/>
          </table:table-cell>
          <table:table-cell table:style-name="ce393" table:formula="of:=+IF([.$B222]&lt;&gt;&quot;&quot;;[.C221]-[.F222];&quot;&quot;)">
            <text:p/>
          </table:table-cell>
          <table:table-cell table:style-name="ce393" table:formula="of:=+IF([.$B222]&lt;&gt;&quot;&quot;;A;&quot;&quot;)">
            <text:p/>
          </table:table-cell>
          <table:table-cell table:style-name="ce393" table:formula="of:=+IF([.$B222]&lt;&gt;&quot;&quot;;[.C221]*[.$D$11];&quot;&quot;)">
            <text:p/>
          </table:table-cell>
          <table:table-cell table:style-name="ce393" table:formula="of:=+IF([.$B222]&lt;&gt;&quot;&quot;;[.D222]-[.E222];&quot;&quot;)">
            <text:p/>
          </table:table-cell>
          <table:table-cell table:style-name="ce409" table:formula="of:=+IF([.$C222]&lt;&gt;&quot;&quot;;[.D22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2]+1)&gt;N;&quot;&quot;;([.B222]+1));&quot;&quot;)">
            <text:p/>
          </table:table-cell>
          <table:table-cell table:style-name="ce393" table:formula="of:=+IF([.$B223]&lt;&gt;&quot;&quot;;[.C222]-[.F223];&quot;&quot;)">
            <text:p/>
          </table:table-cell>
          <table:table-cell table:style-name="ce393" table:formula="of:=+IF([.$B223]&lt;&gt;&quot;&quot;;A;&quot;&quot;)">
            <text:p/>
          </table:table-cell>
          <table:table-cell table:style-name="ce393" table:formula="of:=+IF([.$B223]&lt;&gt;&quot;&quot;;[.C222]*[.$D$11];&quot;&quot;)">
            <text:p/>
          </table:table-cell>
          <table:table-cell table:style-name="ce393" table:formula="of:=+IF([.$B223]&lt;&gt;&quot;&quot;;[.D223]-[.E223];&quot;&quot;)">
            <text:p/>
          </table:table-cell>
          <table:table-cell table:style-name="ce409" table:formula="of:=+IF([.$C223]&lt;&gt;&quot;&quot;;[.D22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3]+1)&gt;N;&quot;&quot;;([.B223]+1));&quot;&quot;)">
            <text:p/>
          </table:table-cell>
          <table:table-cell table:style-name="ce393" table:formula="of:=+IF([.$B224]&lt;&gt;&quot;&quot;;[.C223]-[.F224];&quot;&quot;)">
            <text:p/>
          </table:table-cell>
          <table:table-cell table:style-name="ce393" table:formula="of:=+IF([.$B224]&lt;&gt;&quot;&quot;;A;&quot;&quot;)">
            <text:p/>
          </table:table-cell>
          <table:table-cell table:style-name="ce393" table:formula="of:=+IF([.$B224]&lt;&gt;&quot;&quot;;[.C223]*[.$D$11];&quot;&quot;)">
            <text:p/>
          </table:table-cell>
          <table:table-cell table:style-name="ce393" table:formula="of:=+IF([.$B224]&lt;&gt;&quot;&quot;;[.D224]-[.E224];&quot;&quot;)">
            <text:p/>
          </table:table-cell>
          <table:table-cell table:style-name="ce409" table:formula="of:=+IF([.$C224]&lt;&gt;&quot;&quot;;[.D22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4]+1)&gt;N;&quot;&quot;;([.B224]+1));&quot;&quot;)">
            <text:p/>
          </table:table-cell>
          <table:table-cell table:style-name="ce393" table:formula="of:=+IF([.$B225]&lt;&gt;&quot;&quot;;[.C224]-[.F225];&quot;&quot;)">
            <text:p/>
          </table:table-cell>
          <table:table-cell table:style-name="ce393" table:formula="of:=+IF([.$B225]&lt;&gt;&quot;&quot;;A;&quot;&quot;)">
            <text:p/>
          </table:table-cell>
          <table:table-cell table:style-name="ce393" table:formula="of:=+IF([.$B225]&lt;&gt;&quot;&quot;;[.C224]*[.$D$11];&quot;&quot;)">
            <text:p/>
          </table:table-cell>
          <table:table-cell table:style-name="ce393" table:formula="of:=+IF([.$B225]&lt;&gt;&quot;&quot;;[.D225]-[.E225];&quot;&quot;)">
            <text:p/>
          </table:table-cell>
          <table:table-cell table:style-name="ce409" table:formula="of:=+IF([.$C225]&lt;&gt;&quot;&quot;;[.D225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5]+1)&gt;N;&quot;&quot;;([.B225]+1));&quot;&quot;)">
            <text:p/>
          </table:table-cell>
          <table:table-cell table:style-name="ce393" table:formula="of:=+IF([.$B226]&lt;&gt;&quot;&quot;;[.C225]-[.F226];&quot;&quot;)">
            <text:p/>
          </table:table-cell>
          <table:table-cell table:style-name="ce393" table:formula="of:=+IF([.$B226]&lt;&gt;&quot;&quot;;A;&quot;&quot;)">
            <text:p/>
          </table:table-cell>
          <table:table-cell table:style-name="ce393" table:formula="of:=+IF([.$B226]&lt;&gt;&quot;&quot;;[.C225]*[.$D$11];&quot;&quot;)">
            <text:p/>
          </table:table-cell>
          <table:table-cell table:style-name="ce393" table:formula="of:=+IF([.$B226]&lt;&gt;&quot;&quot;;[.D226]-[.E226];&quot;&quot;)">
            <text:p/>
          </table:table-cell>
          <table:table-cell table:style-name="ce409" table:formula="of:=+IF([.$C226]&lt;&gt;&quot;&quot;;[.D226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6]+1)&gt;N;&quot;&quot;;([.B226]+1));&quot;&quot;)">
            <text:p/>
          </table:table-cell>
          <table:table-cell table:style-name="ce393" table:formula="of:=+IF([.$B227]&lt;&gt;&quot;&quot;;[.C226]-[.F227];&quot;&quot;)">
            <text:p/>
          </table:table-cell>
          <table:table-cell table:style-name="ce393" table:formula="of:=+IF([.$B227]&lt;&gt;&quot;&quot;;A;&quot;&quot;)">
            <text:p/>
          </table:table-cell>
          <table:table-cell table:style-name="ce393" table:formula="of:=+IF([.$B227]&lt;&gt;&quot;&quot;;[.C226]*[.$D$11];&quot;&quot;)">
            <text:p/>
          </table:table-cell>
          <table:table-cell table:style-name="ce393" table:formula="of:=+IF([.$B227]&lt;&gt;&quot;&quot;;[.D227]-[.E227];&quot;&quot;)">
            <text:p/>
          </table:table-cell>
          <table:table-cell table:style-name="ce409" table:formula="of:=+IF([.$C227]&lt;&gt;&quot;&quot;;[.D227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7]+1)&gt;N;&quot;&quot;;([.B227]+1));&quot;&quot;)">
            <text:p/>
          </table:table-cell>
          <table:table-cell table:style-name="ce393" table:formula="of:=+IF([.$B228]&lt;&gt;&quot;&quot;;[.C227]-[.F228];&quot;&quot;)">
            <text:p/>
          </table:table-cell>
          <table:table-cell table:style-name="ce393" table:formula="of:=+IF([.$B228]&lt;&gt;&quot;&quot;;A;&quot;&quot;)">
            <text:p/>
          </table:table-cell>
          <table:table-cell table:style-name="ce393" table:formula="of:=+IF([.$B228]&lt;&gt;&quot;&quot;;[.C227]*[.$D$11];&quot;&quot;)">
            <text:p/>
          </table:table-cell>
          <table:table-cell table:style-name="ce393" table:formula="of:=+IF([.$B228]&lt;&gt;&quot;&quot;;[.D228]-[.E228];&quot;&quot;)">
            <text:p/>
          </table:table-cell>
          <table:table-cell table:style-name="ce409" table:formula="of:=+IF([.$C228]&lt;&gt;&quot;&quot;;[.D228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8]+1)&gt;N;&quot;&quot;;([.B228]+1));&quot;&quot;)">
            <text:p/>
          </table:table-cell>
          <table:table-cell table:style-name="ce393" table:formula="of:=+IF([.$B229]&lt;&gt;&quot;&quot;;[.C228]-[.F229];&quot;&quot;)">
            <text:p/>
          </table:table-cell>
          <table:table-cell table:style-name="ce393" table:formula="of:=+IF([.$B229]&lt;&gt;&quot;&quot;;A;&quot;&quot;)">
            <text:p/>
          </table:table-cell>
          <table:table-cell table:style-name="ce393" table:formula="of:=+IF([.$B229]&lt;&gt;&quot;&quot;;[.C228]*[.$D$11];&quot;&quot;)">
            <text:p/>
          </table:table-cell>
          <table:table-cell table:style-name="ce393" table:formula="of:=+IF([.$B229]&lt;&gt;&quot;&quot;;[.D229]-[.E229];&quot;&quot;)">
            <text:p/>
          </table:table-cell>
          <table:table-cell table:style-name="ce409" table:formula="of:=+IF([.$C229]&lt;&gt;&quot;&quot;;[.D229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29]+1)&gt;N;&quot;&quot;;([.B229]+1));&quot;&quot;)">
            <text:p/>
          </table:table-cell>
          <table:table-cell table:style-name="ce393" table:formula="of:=+IF([.$B230]&lt;&gt;&quot;&quot;;[.C229]-[.F230];&quot;&quot;)">
            <text:p/>
          </table:table-cell>
          <table:table-cell table:style-name="ce393" table:formula="of:=+IF([.$B230]&lt;&gt;&quot;&quot;;A;&quot;&quot;)">
            <text:p/>
          </table:table-cell>
          <table:table-cell table:style-name="ce393" table:formula="of:=+IF([.$B230]&lt;&gt;&quot;&quot;;[.C229]*[.$D$11];&quot;&quot;)">
            <text:p/>
          </table:table-cell>
          <table:table-cell table:style-name="ce393" table:formula="of:=+IF([.$B230]&lt;&gt;&quot;&quot;;[.D230]-[.E230];&quot;&quot;)">
            <text:p/>
          </table:table-cell>
          <table:table-cell table:style-name="ce409" table:formula="of:=+IF([.$C230]&lt;&gt;&quot;&quot;;[.D230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0]+1)&gt;N;&quot;&quot;;([.B230]+1));&quot;&quot;)">
            <text:p/>
          </table:table-cell>
          <table:table-cell table:style-name="ce393" table:formula="of:=+IF([.$B231]&lt;&gt;&quot;&quot;;[.C230]-[.F231];&quot;&quot;)">
            <text:p/>
          </table:table-cell>
          <table:table-cell table:style-name="ce393" table:formula="of:=+IF([.$B231]&lt;&gt;&quot;&quot;;A;&quot;&quot;)">
            <text:p/>
          </table:table-cell>
          <table:table-cell table:style-name="ce393" table:formula="of:=+IF([.$B231]&lt;&gt;&quot;&quot;;[.C230]*[.$D$11];&quot;&quot;)">
            <text:p/>
          </table:table-cell>
          <table:table-cell table:style-name="ce393" table:formula="of:=+IF([.$B231]&lt;&gt;&quot;&quot;;[.D231]-[.E231];&quot;&quot;)">
            <text:p/>
          </table:table-cell>
          <table:table-cell table:style-name="ce409" table:formula="of:=+IF([.$C231]&lt;&gt;&quot;&quot;;[.D231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1]+1)&gt;N;&quot;&quot;;([.B231]+1));&quot;&quot;)">
            <text:p/>
          </table:table-cell>
          <table:table-cell table:style-name="ce393" table:formula="of:=+IF([.$B232]&lt;&gt;&quot;&quot;;[.C231]-[.F232];&quot;&quot;)">
            <text:p/>
          </table:table-cell>
          <table:table-cell table:style-name="ce393" table:formula="of:=+IF([.$B232]&lt;&gt;&quot;&quot;;A;&quot;&quot;)">
            <text:p/>
          </table:table-cell>
          <table:table-cell table:style-name="ce393" table:formula="of:=+IF([.$B232]&lt;&gt;&quot;&quot;;[.C231]*[.$D$11];&quot;&quot;)">
            <text:p/>
          </table:table-cell>
          <table:table-cell table:style-name="ce393" table:formula="of:=+IF([.$B232]&lt;&gt;&quot;&quot;;[.D232]-[.E232];&quot;&quot;)">
            <text:p/>
          </table:table-cell>
          <table:table-cell table:style-name="ce409" table:formula="of:=+IF([.$C232]&lt;&gt;&quot;&quot;;[.D232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2]+1)&gt;N;&quot;&quot;;([.B232]+1));&quot;&quot;)">
            <text:p/>
          </table:table-cell>
          <table:table-cell table:style-name="ce393" table:formula="of:=+IF([.$B233]&lt;&gt;&quot;&quot;;[.C232]-[.F233];&quot;&quot;)">
            <text:p/>
          </table:table-cell>
          <table:table-cell table:style-name="ce393" table:formula="of:=+IF([.$B233]&lt;&gt;&quot;&quot;;A;&quot;&quot;)">
            <text:p/>
          </table:table-cell>
          <table:table-cell table:style-name="ce393" table:formula="of:=+IF([.$B233]&lt;&gt;&quot;&quot;;[.C232]*[.$D$11];&quot;&quot;)">
            <text:p/>
          </table:table-cell>
          <table:table-cell table:style-name="ce393" table:formula="of:=+IF([.$B233]&lt;&gt;&quot;&quot;;[.D233]-[.E233];&quot;&quot;)">
            <text:p/>
          </table:table-cell>
          <table:table-cell table:style-name="ce409" table:formula="of:=+IF([.$C233]&lt;&gt;&quot;&quot;;[.D233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3]+1)&gt;N;&quot;&quot;;([.B233]+1));&quot;&quot;)">
            <text:p/>
          </table:table-cell>
          <table:table-cell table:style-name="ce393" table:formula="of:=+IF([.$B234]&lt;&gt;&quot;&quot;;[.C233]-[.F234];&quot;&quot;)">
            <text:p/>
          </table:table-cell>
          <table:table-cell table:style-name="ce393" table:formula="of:=+IF([.$B234]&lt;&gt;&quot;&quot;;A;&quot;&quot;)">
            <text:p/>
          </table:table-cell>
          <table:table-cell table:style-name="ce393" table:formula="of:=+IF([.$B234]&lt;&gt;&quot;&quot;;[.C233]*[.$D$11];&quot;&quot;)">
            <text:p/>
          </table:table-cell>
          <table:table-cell table:style-name="ce393" table:formula="of:=+IF([.$B234]&lt;&gt;&quot;&quot;;[.D234]-[.E234];&quot;&quot;)">
            <text:p/>
          </table:table-cell>
          <table:table-cell table:style-name="ce409" table:formula="of:=+IF([.$C234]&lt;&gt;&quot;&quot;;[.D234];&quot;&quot;)">
            <text:p/>
          </table:table-cell>
          <table:table-cell table:number-columns-repeated="16377"/>
        </table:table-row>
        <table:table-row table:style-name="ro20">
          <table:table-cell/>
          <table:table-cell table:style-name="ce385" table:formula="of:=+IFERROR(IF(([.B234]+1)&gt;N;&quot;&quot;;([.B234]+1));&quot;&quot;)">
            <text:p/>
          </table:table-cell>
          <table:table-cell table:style-name="ce393" table:formula="of:=+IF([.$B235]&lt;&gt;&quot;&quot;;[.C234]-[.F235];&quot;&quot;)">
            <text:p/>
          </table:table-cell>
          <table:table-cell table:style-name="ce393" table:formula="of:=+IF([.$B235]&lt;&gt;&quot;&quot;;A;&quot;&quot;)">
            <text:p/>
          </table:table-cell>
          <table:table-cell table:style-name="ce393" table:formula="of:=+IF([.$B235]&lt;&gt;&quot;&quot;;[.C234]*[.$D$11];&quot;&quot;)">
            <text:p/>
          </table:table-cell>
          <table:table-cell table:style-name="ce393" table:formula="of:=+IF([.$B235]&lt;&gt;&quot;&quot;;[.D235]-[.E235];&quot;&quot;)">
            <text:p/>
          </table:table-cell>
          <table:table-cell table:style-name="ce409" table:formula="of:=+IF([.$C235]&lt;&gt;&quot;&quot;;[.D235];&quot;&quot;)">
            <text:p/>
          </table:table-cell>
          <table:table-cell table:number-columns-repeated="16377"/>
        </table:table-row>
        <table:table-row table:style-name="ro20" table:number-rows-repeated="1048340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'TABLA AMORTIZACIÓN'.B16:'TABLA AMORTIZACIÓN'.G235">
            <calcext:condition calcext:apply-style-name="ConditionalStyle_15" calcext:value="formula-is([.$C16]=[.$E$9])" calcext:base-cell-address="'TABLA AMORTIZACIÓN'.B16"/>
          </calcext:conditional-format>
        </calcext:conditional-formats>
      </table:table>
      <table:table table:name="Amortización de Préstamos" table:style-name="ta19">
        <table:shapes>
          <draw:a xlink:href="https://www.planillaexcel.com/ayuda/plantillas" xlink:type="simple">
            <draw:custom-shape draw:z-index="0" draw:name="CuadroTexto 1" draw:style-name="gr7" draw:text-style-name="P7" svg:width="14.349cm" svg:height="0.705cm" svg:x="2.011cm" svg:y="0.079cm">
              <text:p text:style-name="P2"><text:span text:style-name="T5">PlanillaExcel.com</text:span><text:span text:style-name="T6"> <text:s text:c="11"/></text:span><text:span text:style-name="T7">Amortización de préstamos <text:s text:c="3"/></text:span><text:span text:style-name="T8">|</text:span><text:span text:style-name="T9"> <text:s text:c="13"/></text:span><text:span text:style-name="T10">AYUDA →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</table:shapes>
        <table:table-column table:style-name="co64" table:default-cell-style-name="ce413"/>
        <table:table-column table:style-name="co68" table:default-cell-style-name="ce413"/>
        <table:table-column table:style-name="co69" table:default-cell-style-name="ce413"/>
        <table:table-column table:style-name="co70" table:default-cell-style-name="ce413"/>
        <table:table-column table:style-name="co71" table:default-cell-style-name="ce413"/>
        <table:table-column table:style-name="co72" table:number-columns-repeated="2" table:default-cell-style-name="ce413"/>
        <table:table-column table:style-name="co73" table:number-columns-repeated="2" table:default-cell-style-name="ce413"/>
        <table:table-column table:style-name="co61" table:number-columns-repeated="4" table:default-cell-style-name="ce413"/>
        <table:table-column table:style-name="co74" table:default-cell-style-name="ce413"/>
        <table:table-column table:style-name="co61" table:number-columns-repeated="16370" table:default-cell-style-name="ce413"/>
        <table:table-row table:style-name="ro17">
          <table:table-cell table:style-name="ce411" table:number-columns-repeated="16384"/>
        </table:table-row>
        <table:table-row table:style-name="ro20">
          <table:table-cell table:style-name="ce412"/>
          <table:table-cell table:number-columns-repeated="16383"/>
        </table:table-row>
        <table:table-row table:style-name="ro20">
          <table:table-cell table:style-name="ce412"/>
          <table:table-cell/>
          <table:table-cell table:style-name="ce419" office:value-type="string" calcext:value-type="string">
            <text:p>Valor del préstamo o principal</text:p>
          </table:table-cell>
          <table:table-cell table:style-name="ce426" table:formula="of:=[.I5]" office:value-type="string" office:string-value="" calcext:value-type="error">
            <text:p>Err:509</text:p>
          </table:table-cell>
          <table:table-cell/>
          <table:table-cell table:style-name="ce436" office:value-type="string" calcext:value-type="string" table:number-columns-spanned="2" table:number-rows-spanned="1">
            <text:p>Resumen:</text:p>
          </table:table-cell>
          <table:covered-table-cell table:style-name="ce436"/>
          <table:table-cell table:number-columns-repeated="16377"/>
        </table:table-row>
        <table:table-row table:style-name="ro20">
          <table:table-cell table:style-name="ce412"/>
          <table:table-cell/>
          <table:table-cell table:style-name="ce420" office:value-type="string" calcext:value-type="string">
            <text:p>TNA (30/360)</text:p>
          </table:table-cell>
          <table:table-cell table:style-name="ce427" table:formula="of:=[.D7]*12" office:value-type="percentage" office:value="0.066" calcext:value-type="percentage">
            <text:p>7 %</text:p>
          </table:table-cell>
          <table:table-cell office:value-type="string" calcext:value-type="string">
            <text:p>real</text:p>
          </table:table-cell>
          <table:table-cell table:style-name="ce437" office:value-type="string" calcext:value-type="string">
            <text:p>Valor préstamo</text:p>
          </table:table-cell>
          <table:table-cell table:style-name="ce440" table:formula="of:=[.D3]" office:value-type="string" office:string-value="" calcext:value-type="error">
            <text:p>Err:509</text:p>
          </table:table-cell>
          <table:table-cell/>
          <table:table-cell table:style-name="ce441" table:formula="of:='b) inversión inicial'!#ref!" office:value-type="string" office:string-value="" calcext:value-type="error">
            <text:p>Err:509</text:p>
          </table:table-cell>
          <table:table-cell table:style-name="ce443" office:value-type="string" calcext:value-type="string">
            <text:p>soles</text:p>
          </table:table-cell>
          <table:table-cell table:number-columns-repeated="16374"/>
        </table:table-row>
        <table:table-row table:style-name="ro20">
          <table:table-cell table:number-columns-repeated="2"/>
          <table:table-cell table:style-name="ce420" office:value-type="string" calcext:value-type="string">
            <text:p>Años</text:p>
          </table:table-cell>
          <table:table-cell table:style-name="ce428" office:value-type="float" office:value="1" calcext:value-type="float">
            <text:p>1</text:p>
          </table:table-cell>
          <table:table-cell/>
          <table:table-cell table:style-name="ce437" office:value-type="string" calcext:value-type="string">
            <text:p>Suma de Cuotas</text:p>
          </table:table-cell>
          <table:table-cell table:style-name="ce440" table:formula="of:=SUM([.$D$14:.$D$400])" office:value-type="string" office:string-value="" calcext:value-type="error">
            <text:p>Err:509</text:p>
          </table:table-cell>
          <table:table-cell/>
          <table:table-cell table:style-name="ce442" table:formula="of:=[.I4]/3.6" office:value-type="string" office:string-value="" calcext:value-type="error">
            <text:p>Err:509</text:p>
          </table:table-cell>
          <table:table-cell office:value-type="string" calcext:value-type="string">
            <text:p>en dólares</text:p>
          </table:table-cell>
          <table:table-cell table:number-columns-repeated="3"/>
          <table:table-cell table:style-name="ce445" office:value-type="string" calcext:value-type="string" table:number-columns-spanned="2" table:number-rows-spanned="1">
            <text:p>Equivalencias TASAS efectiVas</text:p>
          </table:table-cell>
          <table:covered-table-cell table:style-name="ce445"/>
          <table:table-cell table:number-columns-repeated="16369"/>
        </table:table-row>
        <table:table-row table:style-name="ro20">
          <table:table-cell table:number-columns-repeated="2"/>
          <table:table-cell table:style-name="ce420" office:value-type="string" calcext:value-type="string">
            <text:p>Frecuencia de Pago</text:p>
          </table:table-cell>
          <table:table-cell table:style-name="ce426" table:content-validation-name="val1" office:value-type="string" calcext:value-type="string">
            <text:p>Mensual</text:p>
          </table:table-cell>
          <table:table-cell/>
          <table:table-cell table:style-name="ce437" office:value-type="string" calcext:value-type="string">
            <text:p>Suma de Interés</text:p>
          </table:table-cell>
          <table:table-cell table:style-name="ce440" table:formula="of:=SUM([.$E$14:.$E$400])" office:value-type="string" office:string-value="" calcext:value-type="error">
            <text:p>Err:509</text:p>
          </table:table-cell>
          <table:table-cell table:number-columns-repeated="6"/>
          <table:table-cell table:style-name="ce446" office:value-type="string" calcext:value-type="string">
            <text:p>Anual</text:p>
          </table:table-cell>
          <table:table-cell table:style-name="ce447" table:formula="of:=360/360" office:value-type="float" office:value="1" calcext:value-type="float">
            <text:p>1</text:p>
          </table:table-cell>
          <table:table-cell table:number-columns-repeated="16369"/>
        </table:table-row>
        <table:table-row table:style-name="ro20">
          <table:table-cell table:number-columns-repeated="2"/>
          <table:table-cell table:style-name="ce420" office:value-type="string" calcext:value-type="string">
            <text:p>Interés equivalente</text:p>
          </table:table-cell>
          <table:table-cell table:style-name="ce429" office:value-type="percentage" office:value="0.0055" calcext:value-type="percentage">
            <text:p>0.550%</text:p>
          </table:table-cell>
          <table:table-cell table:style-name="ce435"/>
          <table:table-cell table:style-name="ce437" table:number-columns-repeated="2"/>
          <table:table-cell table:number-columns-repeated="6"/>
          <table:table-cell table:style-name="ce446" office:value-type="string" calcext:value-type="string">
            <text:p>Semestral</text:p>
          </table:table-cell>
          <table:table-cell table:style-name="ce447" table:formula="of:=180/360" office:value-type="float" office:value="0.5" calcext:value-type="float">
            <text:p>0.5</text:p>
          </table:table-cell>
          <table:table-cell table:number-columns-repeated="16369"/>
        </table:table-row>
        <table:table-row table:style-name="ro20">
          <table:table-cell table:number-columns-repeated="2"/>
          <table:table-cell table:style-name="ce420" office:value-type="string" calcext:value-type="string">
            <text:p>N° de pagos por año</text:p>
          </table:table-cell>
          <table:table-cell table:style-name="ce430" table:formula="of:=IF([.D6]=&quot;Mensual&quot;;12;IF([.D6]=&quot;Bimensual&quot;;6;IF([.D6]=&quot;Trimestral&quot;;4;IF([.D6]=&quot;Cuatrimestral&quot;;3;IF([.D6]=&quot;Semestral&quot;;2;1)))))" office:value-type="float" office:value="12" calcext:value-type="float">
            <text:p>12</text:p>
          </table:table-cell>
          <table:table-cell table:style-name="ce435"/>
          <table:table-cell table:style-name="ce437" table:number-columns-repeated="2"/>
          <table:table-cell/>
          <table:table-cell office:value-type="string" calcext:value-type="string">
            <text:p>CAMBIAR A DOLARES LA TASA DE INTERES</text:p>
          </table:table-cell>
          <table:table-cell table:number-columns-repeated="4"/>
          <table:table-cell table:style-name="ce446" office:value-type="string" calcext:value-type="string">
            <text:p>Cuatrimestral</text:p>
          </table:table-cell>
          <table:table-cell table:style-name="ce447" table:formula="of:=120/360" office:value-type="float" office:value="0.333333333333333" calcext:value-type="float">
            <text:p>0.333333333333333</text:p>
          </table:table-cell>
          <table:table-cell table:number-columns-repeated="16369"/>
        </table:table-row>
        <table:table-row table:style-name="ro20">
          <table:table-cell table:number-columns-repeated="2"/>
          <table:table-cell table:style-name="ce420" office:value-type="string" calcext:value-type="string">
            <text:p>N° Total de Cuotas</text:p>
          </table:table-cell>
          <table:table-cell table:style-name="ce430" table:formula="of:=[.D5]*[.D8]" office:value-type="float" office:value="12" calcext:value-type="float">
            <text:p>12</text:p>
          </table:table-cell>
          <table:table-cell table:style-name="ce435"/>
          <table:table-cell table:number-columns-repeated="8"/>
          <table:table-cell table:style-name="ce446" office:value-type="string" calcext:value-type="string">
            <text:p>Trimestral</text:p>
          </table:table-cell>
          <table:table-cell table:style-name="ce447" table:formula="of:=90/360" office:value-type="float" office:value="0.25" calcext:value-type="float">
            <text:p>0.25</text:p>
          </table:table-cell>
          <table:table-cell table:number-columns-repeated="16369"/>
        </table:table-row>
        <table:table-row table:style-name="ro20">
          <table:table-cell table:number-columns-repeated="13"/>
          <table:table-cell table:style-name="ce446" office:value-type="string" calcext:value-type="string">
            <text:p>Bimensual</text:p>
          </table:table-cell>
          <table:table-cell table:style-name="ce447" table:formula="of:=60/360" office:value-type="float" office:value="0.166666666666667" calcext:value-type="float">
            <text:p>0.166666666666667</text:p>
          </table:table-cell>
          <table:table-cell table:number-columns-repeated="16369"/>
        </table:table-row>
        <table:table-row table:style-name="ro20">
          <table:table-cell table:number-columns-repeated="3"/>
          <table:table-cell table:style-name="ce431" table:number-columns-repeated="2"/>
          <table:table-cell table:number-columns-repeated="8"/>
          <table:table-cell table:style-name="ce446" office:value-type="string" calcext:value-type="string">
            <text:p>Mensual</text:p>
          </table:table-cell>
          <table:table-cell table:style-name="ce447" table:formula="of:=30/360" office:value-type="float" office:value="0.0833333333333333" calcext:value-type="float">
            <text:p>0.0833333333333333</text:p>
          </table:table-cell>
          <table:table-cell table:number-columns-repeated="16369"/>
        </table:table-row>
        <table:table-row table:style-name="ro24">
          <table:table-cell table:style-name="ce414"/>
          <table:table-cell/>
          <table:table-cell table:style-name="ce419" office:value-type="string" calcext:value-type="string">
            <text:p>Número de Cuota</text:p>
          </table:table-cell>
          <table:table-cell table:style-name="ce419" office:value-type="string" calcext:value-type="string">
            <text:p>CUOTA A PAGAR</text:p>
          </table:table-cell>
          <table:table-cell table:style-name="ce419" office:value-type="string" calcext:value-type="string">
            <text:p>INTERÉS</text:p>
          </table:table-cell>
          <table:table-cell table:style-name="ce419" office:value-type="string" calcext:value-type="string">
            <text:p>CAPITAL AMORTIZADO</text:p>
          </table:table-cell>
          <table:table-cell table:style-name="ce419" office:value-type="string" calcext:value-type="string">
            <text:p>SALDO FINAL</text:p>
          </table:table-cell>
          <table:table-cell table:number-columns-repeated="16377"/>
        </table:table-row>
        <table:table-row table:style-name="ro20">
          <table:table-cell table:style-name="ce414" table:number-columns-repeated="2"/>
          <table:table-cell table:style-name="ce421" office:value-type="float" office:value="0" calcext:value-type="float">
            <text:p>0</text:p>
          </table:table-cell>
          <table:table-cell table:style-name="ce432" table:number-columns-repeated="2"/>
          <table:table-cell table:style-name="ce438"/>
          <table:table-cell table:style-name="ce432" table:formula="of:=[.D3]" office:value-type="string" office:string-value="" calcext:value-type="error">
            <text:p>Err:509</text:p>
          </table:table-cell>
          <table:table-cell table:style-name="ce414"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13]=[.$D$9];[.C13]=&quot;&quot;);&quot;&quot;;IF(ISNUMBER([.C13]);[.C13]+1;1))" office:value-type="float" office:value="1" calcext:value-type="float">
            <text:p>1</text:p>
          </table:table-cell>
          <table:table-cell table:style-name="ce433" table:formula="of:=IF([.C14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4]&gt;[.$D$9];&quot;&quot;;[.$D$7]*[.G13])" office:value-type="string" office:string-value="" calcext:value-type="error">
            <text:p>Err:509</text:p>
          </table:table-cell>
          <table:table-cell table:style-name="ce439" table:formula="of:=IF([.C14]&gt;[.$D$9];&quot;&quot;;[.D14]-[.E14])" office:value-type="string" office:string-value="" calcext:value-type="error">
            <text:p>Err:509</text:p>
          </table:table-cell>
          <table:table-cell table:style-name="ce433" table:formula="of:=IF([.C14]&gt;[.$D$9];&quot;&quot;;[.G13]-[.F14])" office:value-type="string" office:string-value="" calcext:value-type="error">
            <text:p>Err:509</text:p>
          </table:table-cell>
          <table:table-cell table:number-columns-repeated="2"/>
          <table:table-cell table:style-name="ce444"/>
          <table:table-cell table:number-columns-repeated="16374"/>
        </table:table-row>
        <table:table-row table:style-name="ro20">
          <table:table-cell table:style-name="ce416"/>
          <table:table-cell/>
          <table:table-cell table:style-name="ce422" table:formula="of:=IF(OR([.C14]=[.$D$9];[.C14]=&quot;&quot;);&quot;&quot;;IF(ISNUMBER([.C14]);[.C14]+1;1))" office:value-type="float" office:value="2" calcext:value-type="float">
            <text:p>2</text:p>
          </table:table-cell>
          <table:table-cell table:style-name="ce433" table:formula="of:=IF([.C15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5]&gt;[.$D$9];&quot;&quot;;[.$D$7]*[.G14])" office:value-type="string" office:string-value="" calcext:value-type="error">
            <text:p>Err:509</text:p>
          </table:table-cell>
          <table:table-cell table:style-name="ce439" table:formula="of:=IF([.C15]&gt;[.$D$9];&quot;&quot;;[.D15]-[.E15])" office:value-type="string" office:string-value="" calcext:value-type="error">
            <text:p>Err:509</text:p>
          </table:table-cell>
          <table:table-cell table:style-name="ce433" table:formula="of:=IF([.C15]&gt;[.$D$9];&quot;&quot;;[.G14]-[.F15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15]=[.$D$9];[.C15]=&quot;&quot;);&quot;&quot;;IF(ISNUMBER([.C15]);[.C15]+1;1))" office:value-type="float" office:value="3" calcext:value-type="float">
            <text:p>3</text:p>
          </table:table-cell>
          <table:table-cell table:style-name="ce433" table:formula="of:=IF([.C16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6]&gt;[.$D$9];&quot;&quot;;[.$D$7]*[.G15])" office:value-type="string" office:string-value="" calcext:value-type="error">
            <text:p>Err:509</text:p>
          </table:table-cell>
          <table:table-cell table:style-name="ce439" table:formula="of:=IF([.C16]&gt;[.$D$9];&quot;&quot;;[.D16]-[.E16])" office:value-type="string" office:string-value="" calcext:value-type="error">
            <text:p>Err:509</text:p>
          </table:table-cell>
          <table:table-cell table:style-name="ce433" table:formula="of:=IF([.C16]&gt;[.$D$9];&quot;&quot;;[.G15]-[.F16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16]=[.$D$9];[.C16]=&quot;&quot;);&quot;&quot;;IF(ISNUMBER([.C16]);[.C16]+1;1))" office:value-type="float" office:value="4" calcext:value-type="float">
            <text:p>4</text:p>
          </table:table-cell>
          <table:table-cell table:style-name="ce433" table:formula="of:=IF([.C17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7]&gt;[.$D$9];&quot;&quot;;[.$D$7]*[.G16])" office:value-type="string" office:string-value="" calcext:value-type="error">
            <text:p>Err:509</text:p>
          </table:table-cell>
          <table:table-cell table:style-name="ce439" table:formula="of:=IF([.C17]&gt;[.$D$9];&quot;&quot;;[.D17]-[.E17])" office:value-type="string" office:string-value="" calcext:value-type="error">
            <text:p>Err:509</text:p>
          </table:table-cell>
          <table:table-cell table:style-name="ce433" table:formula="of:=IF([.C17]&gt;[.$D$9];&quot;&quot;;[.G16]-[.F17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17]=[.$D$9];[.C17]=&quot;&quot;);&quot;&quot;;IF(ISNUMBER([.C17]);[.C17]+1;1))" office:value-type="float" office:value="5" calcext:value-type="float">
            <text:p>5</text:p>
          </table:table-cell>
          <table:table-cell table:style-name="ce433" table:formula="of:=IF([.C18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8]&gt;[.$D$9];&quot;&quot;;[.$D$7]*[.G17])" office:value-type="string" office:string-value="" calcext:value-type="error">
            <text:p>Err:509</text:p>
          </table:table-cell>
          <table:table-cell table:style-name="ce439" table:formula="of:=IF([.C18]&gt;[.$D$9];&quot;&quot;;[.D18]-[.E18])" office:value-type="string" office:string-value="" calcext:value-type="error">
            <text:p>Err:509</text:p>
          </table:table-cell>
          <table:table-cell table:style-name="ce433" table:formula="of:=IF([.C18]&gt;[.$D$9];&quot;&quot;;[.G17]-[.F18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18]=[.$D$9];[.C18]=&quot;&quot;);&quot;&quot;;IF(ISNUMBER([.C18]);[.C18]+1;1))" office:value-type="float" office:value="6" calcext:value-type="float">
            <text:p>6</text:p>
          </table:table-cell>
          <table:table-cell table:style-name="ce433" table:formula="of:=IF([.C19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19]&gt;[.$D$9];&quot;&quot;;[.$D$7]*[.G18])" office:value-type="string" office:string-value="" calcext:value-type="error">
            <text:p>Err:509</text:p>
          </table:table-cell>
          <table:table-cell table:style-name="ce439" table:formula="of:=IF([.C19]&gt;[.$D$9];&quot;&quot;;[.D19]-[.E19])" office:value-type="string" office:string-value="" calcext:value-type="error">
            <text:p>Err:509</text:p>
          </table:table-cell>
          <table:table-cell table:style-name="ce433" table:formula="of:=IF([.C19]&gt;[.$D$9];&quot;&quot;;[.G18]-[.F19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19]=[.$D$9];[.C19]=&quot;&quot;);&quot;&quot;;IF(ISNUMBER([.C19]);[.C19]+1;1))" office:value-type="float" office:value="7" calcext:value-type="float">
            <text:p>7</text:p>
          </table:table-cell>
          <table:table-cell table:style-name="ce433" table:formula="of:=IF([.C20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0]&gt;[.$D$9];&quot;&quot;;[.$D$7]*[.G19])" office:value-type="string" office:string-value="" calcext:value-type="error">
            <text:p>Err:509</text:p>
          </table:table-cell>
          <table:table-cell table:style-name="ce439" table:formula="of:=IF([.C20]&gt;[.$D$9];&quot;&quot;;[.D20]-[.E20])" office:value-type="string" office:string-value="" calcext:value-type="error">
            <text:p>Err:509</text:p>
          </table:table-cell>
          <table:table-cell table:style-name="ce433" table:formula="of:=IF([.C20]&gt;[.$D$9];&quot;&quot;;[.G19]-[.F20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0]=[.$D$9];[.C20]=&quot;&quot;);&quot;&quot;;IF(ISNUMBER([.C20]);[.C20]+1;1))" office:value-type="float" office:value="8" calcext:value-type="float">
            <text:p>8</text:p>
          </table:table-cell>
          <table:table-cell table:style-name="ce433" table:formula="of:=IF([.C21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1]&gt;[.$D$9];&quot;&quot;;[.$D$7]*[.G20])" office:value-type="string" office:string-value="" calcext:value-type="error">
            <text:p>Err:509</text:p>
          </table:table-cell>
          <table:table-cell table:style-name="ce439" table:formula="of:=IF([.C21]&gt;[.$D$9];&quot;&quot;;[.D21]-[.E21])" office:value-type="string" office:string-value="" calcext:value-type="error">
            <text:p>Err:509</text:p>
          </table:table-cell>
          <table:table-cell table:style-name="ce433" table:formula="of:=IF([.C21]&gt;[.$D$9];&quot;&quot;;[.G20]-[.F21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1]=[.$D$9];[.C21]=&quot;&quot;);&quot;&quot;;IF(ISNUMBER([.C21]);[.C21]+1;1))" office:value-type="float" office:value="9" calcext:value-type="float">
            <text:p>9</text:p>
          </table:table-cell>
          <table:table-cell table:style-name="ce433" table:formula="of:=IF([.C22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2]&gt;[.$D$9];&quot;&quot;;[.$D$7]*[.G21])" office:value-type="string" office:string-value="" calcext:value-type="error">
            <text:p>Err:509</text:p>
          </table:table-cell>
          <table:table-cell table:style-name="ce439" table:formula="of:=IF([.C22]&gt;[.$D$9];&quot;&quot;;[.D22]-[.E22])" office:value-type="string" office:string-value="" calcext:value-type="error">
            <text:p>Err:509</text:p>
          </table:table-cell>
          <table:table-cell table:style-name="ce433" table:formula="of:=IF([.C22]&gt;[.$D$9];&quot;&quot;;[.G21]-[.F22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22]=[.$D$9];[.C22]=&quot;&quot;);&quot;&quot;;IF(ISNUMBER([.C22]);[.C22]+1;1))" office:value-type="float" office:value="10" calcext:value-type="float">
            <text:p>10</text:p>
          </table:table-cell>
          <table:table-cell table:style-name="ce433" table:formula="of:=IF([.C23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3]&gt;[.$D$9];&quot;&quot;;[.$D$7]*[.G22])" office:value-type="string" office:string-value="" calcext:value-type="error">
            <text:p>Err:509</text:p>
          </table:table-cell>
          <table:table-cell table:style-name="ce439" table:formula="of:=IF([.C23]&gt;[.$D$9];&quot;&quot;;[.D23]-[.E23])" office:value-type="string" office:string-value="" calcext:value-type="error">
            <text:p>Err:509</text:p>
          </table:table-cell>
          <table:table-cell table:style-name="ce433" table:formula="of:=IF([.C23]&gt;[.$D$9];&quot;&quot;;[.G22]-[.F23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3]=[.$D$9];[.C23]=&quot;&quot;);&quot;&quot;;IF(ISNUMBER([.C23]);[.C23]+1;1))" office:value-type="float" office:value="11" calcext:value-type="float">
            <text:p>11</text:p>
          </table:table-cell>
          <table:table-cell table:style-name="ce433" table:formula="of:=IF([.C24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4]&gt;[.$D$9];&quot;&quot;;[.$D$7]*[.G23])" office:value-type="string" office:string-value="" calcext:value-type="error">
            <text:p>Err:509</text:p>
          </table:table-cell>
          <table:table-cell table:style-name="ce439" table:formula="of:=IF([.C24]&gt;[.$D$9];&quot;&quot;;[.D24]-[.E24])" office:value-type="string" office:string-value="" calcext:value-type="error">
            <text:p>Err:509</text:p>
          </table:table-cell>
          <table:table-cell table:style-name="ce433" table:formula="of:=IF([.C24]&gt;[.$D$9];&quot;&quot;;[.G23]-[.F24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4]=[.$D$9];[.C24]=&quot;&quot;);&quot;&quot;;IF(ISNUMBER([.C24]);[.C24]+1;1))" office:value-type="float" office:value="12" calcext:value-type="float">
            <text:p>12</text:p>
          </table:table-cell>
          <table:table-cell table:style-name="ce433" table:formula="of:=IF([.C25]&gt;[.$D$9];&quot;&quot;;PMT([.$D$7];[.$D$9];[.$D$3])*-1)" office:value-type="string" office:string-value="" calcext:value-type="error">
            <text:p>Err:509</text:p>
          </table:table-cell>
          <table:table-cell table:style-name="ce433" table:formula="of:=IF([.C25]&gt;[.$D$9];&quot;&quot;;[.$D$7]*[.G24])" office:value-type="string" office:string-value="" calcext:value-type="error">
            <text:p>Err:509</text:p>
          </table:table-cell>
          <table:table-cell table:style-name="ce439" table:formula="of:=IF([.C25]&gt;[.$D$9];&quot;&quot;;[.D25]-[.E25])" office:value-type="string" office:string-value="" calcext:value-type="error">
            <text:p>Err:509</text:p>
          </table:table-cell>
          <table:table-cell table:style-name="ce433" table:formula="of:=IF([.C25]&gt;[.$D$9];&quot;&quot;;[.G24]-[.F25])" office:value-type="string" office:string-value="" calcext:value-type="error">
            <text:p>Err:509</text:p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25]=[.$D$9];[.C25]=&quot;&quot;);&quot;&quot;;IF(ISNUMBER([.C25]);[.C25]+1;1))">
            <text:p/>
          </table:table-cell>
          <table:table-cell table:style-name="ce433" table:formula="of:=IF([.C26]&gt;[.$D$9];&quot;&quot;;PMT([.$D$7];[.$D$9];[.$D$3])*-1)">
            <text:p/>
          </table:table-cell>
          <table:table-cell table:style-name="ce433" table:formula="of:=IF([.C26]&gt;[.$D$9];&quot;&quot;;[.$D$7]*[.G25])">
            <text:p/>
          </table:table-cell>
          <table:table-cell table:style-name="ce439" table:formula="of:=IF([.C26]&gt;[.$D$9];&quot;&quot;;[.D26]-[.E26])">
            <text:p/>
          </table:table-cell>
          <table:table-cell table:style-name="ce433" table:formula="of:=IF([.C26]&gt;[.$D$9];&quot;&quot;;[.G25]-[.F26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6]=[.$D$9];[.C26]=&quot;&quot;);&quot;&quot;;IF(ISNUMBER([.C26]);[.C26]+1;1))">
            <text:p/>
          </table:table-cell>
          <table:table-cell table:style-name="ce433" table:formula="of:=IF([.C27]&gt;[.$D$9];&quot;&quot;;PMT([.$D$7];[.$D$9];[.$D$3])*-1)">
            <text:p/>
          </table:table-cell>
          <table:table-cell table:style-name="ce433" table:formula="of:=IF([.C27]&gt;[.$D$9];&quot;&quot;;[.$D$7]*[.G26])">
            <text:p/>
          </table:table-cell>
          <table:table-cell table:style-name="ce439" table:formula="of:=IF([.C27]&gt;[.$D$9];&quot;&quot;;[.D27]-[.E27])">
            <text:p/>
          </table:table-cell>
          <table:table-cell table:style-name="ce433" table:formula="of:=IF([.C27]&gt;[.$D$9];&quot;&quot;;[.G26]-[.F27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27]=[.$D$9];[.C27]=&quot;&quot;);&quot;&quot;;IF(ISNUMBER([.C27]);[.C27]+1;1))">
            <text:p/>
          </table:table-cell>
          <table:table-cell table:style-name="ce433" table:formula="of:=IF([.C28]&gt;[.$D$9];&quot;&quot;;PMT([.$D$7];[.$D$9];[.$D$3])*-1)">
            <text:p/>
          </table:table-cell>
          <table:table-cell table:style-name="ce433" table:formula="of:=IF([.C28]&gt;[.$D$9];&quot;&quot;;[.$D$7]*[.G27])">
            <text:p/>
          </table:table-cell>
          <table:table-cell table:style-name="ce439" table:formula="of:=IF([.C28]&gt;[.$D$9];&quot;&quot;;[.D28]-[.E28])">
            <text:p/>
          </table:table-cell>
          <table:table-cell table:style-name="ce433" table:formula="of:=IF([.C28]&gt;[.$D$9];&quot;&quot;;[.G27]-[.F28])">
            <text:p/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28]=[.$D$9];[.C28]=&quot;&quot;);&quot;&quot;;IF(ISNUMBER([.C28]);[.C28]+1;1))">
            <text:p/>
          </table:table-cell>
          <table:table-cell table:style-name="ce433" table:formula="of:=IF([.C29]&gt;[.$D$9];&quot;&quot;;PMT([.$D$7];[.$D$9];[.$D$3])*-1)">
            <text:p/>
          </table:table-cell>
          <table:table-cell table:style-name="ce433" table:formula="of:=IF([.C29]&gt;[.$D$9];&quot;&quot;;[.$D$7]*[.G28])">
            <text:p/>
          </table:table-cell>
          <table:table-cell table:style-name="ce439" table:formula="of:=IF([.C29]&gt;[.$D$9];&quot;&quot;;[.D29]-[.E29])">
            <text:p/>
          </table:table-cell>
          <table:table-cell table:style-name="ce433" table:formula="of:=IF([.C29]&gt;[.$D$9];&quot;&quot;;[.G28]-[.F29])">
            <text:p/>
          </table:table-cell>
          <table:table-cell table:number-columns-repeated="16377"/>
        </table:table-row>
        <table:table-row table:style-name="ro20">
          <table:table-cell table:style-name="ce415"/>
          <table:table-cell/>
          <table:table-cell table:style-name="ce422" table:formula="of:=IF(OR([.C29]=[.$D$9];[.C29]=&quot;&quot;);&quot;&quot;;IF(ISNUMBER([.C29]);[.C29]+1;1))">
            <text:p/>
          </table:table-cell>
          <table:table-cell table:style-name="ce433" table:formula="of:=IF([.C30]&gt;[.$D$9];&quot;&quot;;PMT([.$D$7];[.$D$9];[.$D$3])*-1)">
            <text:p/>
          </table:table-cell>
          <table:table-cell table:style-name="ce433" table:formula="of:=IF([.C30]&gt;[.$D$9];&quot;&quot;;[.$D$7]*[.G29])">
            <text:p/>
          </table:table-cell>
          <table:table-cell table:style-name="ce439" table:formula="of:=IF([.C30]&gt;[.$D$9];&quot;&quot;;[.D30]-[.E30])">
            <text:p/>
          </table:table-cell>
          <table:table-cell table:style-name="ce433" table:formula="of:=IF([.C30]&gt;[.$D$9];&quot;&quot;;[.G29]-[.F30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30]=[.$D$9];[.C30]=&quot;&quot;);&quot;&quot;;IF(ISNUMBER([.C30]);[.C30]+1;1))">
            <text:p/>
          </table:table-cell>
          <table:table-cell table:style-name="ce433" table:formula="of:=IF([.C31]&gt;[.$D$9];&quot;&quot;;PMT([.$D$7];[.$D$9];[.$D$3])*-1)">
            <text:p/>
          </table:table-cell>
          <table:table-cell table:style-name="ce433" table:formula="of:=IF([.C31]&gt;[.$D$9];&quot;&quot;;[.$D$7]*[.G30])">
            <text:p/>
          </table:table-cell>
          <table:table-cell table:style-name="ce439" table:formula="of:=IF([.C31]&gt;[.$D$9];&quot;&quot;;[.D31]-[.E31])">
            <text:p/>
          </table:table-cell>
          <table:table-cell table:style-name="ce433" table:formula="of:=IF([.C31]&gt;[.$D$9];&quot;&quot;;[.G30]-[.F31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31]=[.$D$9];[.C31]=&quot;&quot;);&quot;&quot;;IF(ISNUMBER([.C31]);[.C31]+1;1))">
            <text:p/>
          </table:table-cell>
          <table:table-cell table:style-name="ce433" table:formula="of:=IF([.C32]&gt;[.$D$9];&quot;&quot;;PMT([.$D$7];[.$D$9];[.$D$3])*-1)">
            <text:p/>
          </table:table-cell>
          <table:table-cell table:style-name="ce433" table:formula="of:=IF([.C32]&gt;[.$D$9];&quot;&quot;;[.$D$7]*[.G31])">
            <text:p/>
          </table:table-cell>
          <table:table-cell table:style-name="ce439" table:formula="of:=IF([.C32]&gt;[.$D$9];&quot;&quot;;[.D32]-[.E32])">
            <text:p/>
          </table:table-cell>
          <table:table-cell table:style-name="ce433" table:formula="of:=IF([.C32]&gt;[.$D$9];&quot;&quot;;[.G31]-[.F32])">
            <text:p/>
          </table:table-cell>
          <table:table-cell table:number-columns-repeated="16377"/>
        </table:table-row>
        <table:table-row table:style-name="ro8">
          <table:table-cell table:style-name="ce415"/>
          <table:table-cell/>
          <table:table-cell table:style-name="ce422" table:formula="of:=IF(OR([.C32]=[.$D$9];[.C32]=&quot;&quot;);&quot;&quot;;IF(ISNUMBER([.C32]);[.C32]+1;1))">
            <text:p/>
          </table:table-cell>
          <table:table-cell table:style-name="ce433" table:formula="of:=IF([.C33]&gt;[.$D$9];&quot;&quot;;PMT([.$D$7];[.$D$9];[.$D$3])*-1)">
            <text:p/>
          </table:table-cell>
          <table:table-cell table:style-name="ce433" table:formula="of:=IF([.C33]&gt;[.$D$9];&quot;&quot;;[.$D$7]*[.G32])">
            <text:p/>
          </table:table-cell>
          <table:table-cell table:style-name="ce439" table:formula="of:=IF([.C33]&gt;[.$D$9];&quot;&quot;;[.D33]-[.E33])">
            <text:p/>
          </table:table-cell>
          <table:table-cell table:style-name="ce433" table:formula="of:=IF([.C33]&gt;[.$D$9];&quot;&quot;;[.G32]-[.F33])">
            <text:p/>
          </table:table-cell>
          <table:table-cell table:number-columns-repeated="16377"/>
        </table:table-row>
        <table:table-row table:style-name="ro8">
          <table:table-cell table:style-name="ce414"/>
          <table:table-cell/>
          <table:table-cell table:style-name="ce422" table:formula="of:=IF(OR([.C33]=[.$D$9];[.C33]=&quot;&quot;);&quot;&quot;;IF(ISNUMBER([.C33]);[.C33]+1;1))">
            <text:p/>
          </table:table-cell>
          <table:table-cell table:style-name="ce433" table:formula="of:=IF([.C34]&gt;[.$D$9];&quot;&quot;;PMT([.$D$7];[.$D$9];[.$D$3])*-1)">
            <text:p/>
          </table:table-cell>
          <table:table-cell table:style-name="ce433" table:formula="of:=IF([.C34]&gt;[.$D$9];&quot;&quot;;[.$D$7]*[.G33])">
            <text:p/>
          </table:table-cell>
          <table:table-cell table:style-name="ce439" table:formula="of:=IF([.C34]&gt;[.$D$9];&quot;&quot;;[.D34]-[.E34])">
            <text:p/>
          </table:table-cell>
          <table:table-cell table:style-name="ce433" table:formula="of:=IF([.C34]&gt;[.$D$9];&quot;&quot;;[.G33]-[.F34])">
            <text:p/>
          </table:table-cell>
          <table:table-cell table:number-columns-repeated="16377"/>
        </table:table-row>
        <table:table-row table:style-name="ro8">
          <table:table-cell table:style-name="ce417"/>
          <table:table-cell/>
          <table:table-cell table:style-name="ce422" table:formula="of:=IF(OR([.C34]=[.$D$9];[.C34]=&quot;&quot;);&quot;&quot;;IF(ISNUMBER([.C34]);[.C34]+1;1))">
            <text:p/>
          </table:table-cell>
          <table:table-cell table:style-name="ce433" table:formula="of:=IF([.C35]&gt;[.$D$9];&quot;&quot;;PMT([.$D$7];[.$D$9];[.$D$3])*-1)">
            <text:p/>
          </table:table-cell>
          <table:table-cell table:style-name="ce433" table:formula="of:=IF([.C35]&gt;[.$D$9];&quot;&quot;;[.$D$7]*[.G34])">
            <text:p/>
          </table:table-cell>
          <table:table-cell table:style-name="ce439" table:formula="of:=IF([.C35]&gt;[.$D$9];&quot;&quot;;[.D35]-[.E35])">
            <text:p/>
          </table:table-cell>
          <table:table-cell table:style-name="ce433" table:formula="of:=IF([.C35]&gt;[.$D$9];&quot;&quot;;[.G34]-[.F35])">
            <text:p/>
          </table:table-cell>
          <table:table-cell table:number-columns-repeated="16377"/>
        </table:table-row>
        <table:table-row table:style-name="ro8">
          <table:table-cell table:style-name="ce414"/>
          <table:table-cell/>
          <table:table-cell table:style-name="ce422" table:formula="of:=IF(OR([.C35]=[.$D$9];[.C35]=&quot;&quot;);&quot;&quot;;IF(ISNUMBER([.C35]);[.C35]+1;1))">
            <text:p/>
          </table:table-cell>
          <table:table-cell table:style-name="ce433" table:formula="of:=IF([.C36]&gt;[.$D$9];&quot;&quot;;PMT([.$D$7];[.$D$9];[.$D$3])*-1)">
            <text:p/>
          </table:table-cell>
          <table:table-cell table:style-name="ce433" table:formula="of:=IF([.C36]&gt;[.$D$9];&quot;&quot;;[.$D$7]*[.G35])">
            <text:p/>
          </table:table-cell>
          <table:table-cell table:style-name="ce439" table:formula="of:=IF([.C36]&gt;[.$D$9];&quot;&quot;;[.D36]-[.E36])">
            <text:p/>
          </table:table-cell>
          <table:table-cell table:style-name="ce433" table:formula="of:=IF([.C36]&gt;[.$D$9];&quot;&quot;;[.G35]-[.F36])">
            <text:p/>
          </table:table-cell>
          <table:table-cell table:number-columns-repeated="16377"/>
        </table:table-row>
        <table:table-row table:style-name="ro8">
          <table:table-cell table:style-name="ce414"/>
          <table:table-cell/>
          <table:table-cell table:style-name="ce422" table:formula="of:=IF(OR([.C36]=[.$D$9];[.C36]=&quot;&quot;);&quot;&quot;;IF(ISNUMBER([.C36]);[.C36]+1;1))">
            <text:p/>
          </table:table-cell>
          <table:table-cell table:style-name="ce433" table:formula="of:=IF([.C37]&gt;[.$D$9];&quot;&quot;;PMT([.$D$7];[.$D$9];[.$D$3])*-1)">
            <text:p/>
          </table:table-cell>
          <table:table-cell table:style-name="ce433" table:formula="of:=IF([.C37]&gt;[.$D$9];&quot;&quot;;[.$D$7]*[.G36])">
            <text:p/>
          </table:table-cell>
          <table:table-cell table:style-name="ce439" table:formula="of:=IF([.C37]&gt;[.$D$9];&quot;&quot;;[.D37]-[.E37])">
            <text:p/>
          </table:table-cell>
          <table:table-cell table:style-name="ce433" table:formula="of:=IF([.C37]&gt;[.$D$9];&quot;&quot;;[.G36]-[.F37])">
            <text:p/>
          </table:table-cell>
          <table:table-cell table:number-columns-repeated="16377"/>
        </table:table-row>
        <table:table-row table:style-name="ro20">
          <table:table-cell table:style-name="ce418"/>
          <table:table-cell/>
          <table:table-cell table:style-name="ce422" table:formula="of:=IF(OR([.C37]=[.$D$9];[.C37]=&quot;&quot;);&quot;&quot;;IF(ISNUMBER([.C37]);[.C37]+1;1))">
            <text:p/>
          </table:table-cell>
          <table:table-cell table:style-name="ce433" table:formula="of:=IF([.C38]&gt;[.$D$9];&quot;&quot;;PMT([.$D$7];[.$D$9];[.$D$3])*-1)">
            <text:p/>
          </table:table-cell>
          <table:table-cell table:style-name="ce433" table:formula="of:=IF([.C38]&gt;[.$D$9];&quot;&quot;;[.$D$7]*[.G37])">
            <text:p/>
          </table:table-cell>
          <table:table-cell table:style-name="ce439" table:formula="of:=IF([.C38]&gt;[.$D$9];&quot;&quot;;[.D38]-[.E38])">
            <text:p/>
          </table:table-cell>
          <table:table-cell table:style-name="ce433" table:formula="of:=IF([.C38]&gt;[.$D$9];&quot;&quot;;[.G37]-[.F38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38]=[.$D$9];[.C38]=&quot;&quot;);&quot;&quot;;IF(ISNUMBER([.C38]);[.C38]+1;1))">
            <text:p/>
          </table:table-cell>
          <table:table-cell table:style-name="ce433" table:formula="of:=IF([.C39]&gt;[.$D$9];&quot;&quot;;PMT([.$D$7];[.$D$9];[.$D$3])*-1)">
            <text:p/>
          </table:table-cell>
          <table:table-cell table:style-name="ce433" table:formula="of:=IF([.C39]&gt;[.$D$9];&quot;&quot;;[.$D$7]*[.G38])">
            <text:p/>
          </table:table-cell>
          <table:table-cell table:style-name="ce439" table:formula="of:=IF([.C39]&gt;[.$D$9];&quot;&quot;;[.D39]-[.E39])">
            <text:p/>
          </table:table-cell>
          <table:table-cell table:style-name="ce433" table:formula="of:=IF([.C39]&gt;[.$D$9];&quot;&quot;;[.G38]-[.F39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39]=[.$D$9];[.C39]=&quot;&quot;);&quot;&quot;;IF(ISNUMBER([.C39]);[.C39]+1;1))">
            <text:p/>
          </table:table-cell>
          <table:table-cell table:style-name="ce433" table:formula="of:=IF([.C40]&gt;[.$D$9];&quot;&quot;;PMT([.$D$7];[.$D$9];[.$D$3])*-1)">
            <text:p/>
          </table:table-cell>
          <table:table-cell table:style-name="ce433" table:formula="of:=IF([.C40]&gt;[.$D$9];&quot;&quot;;[.$D$7]*[.G39])">
            <text:p/>
          </table:table-cell>
          <table:table-cell table:style-name="ce439" table:formula="of:=IF([.C40]&gt;[.$D$9];&quot;&quot;;[.D40]-[.E40])">
            <text:p/>
          </table:table-cell>
          <table:table-cell table:style-name="ce433" table:formula="of:=IF([.C40]&gt;[.$D$9];&quot;&quot;;[.G39]-[.F40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0]=[.$D$9];[.C40]=&quot;&quot;);&quot;&quot;;IF(ISNUMBER([.C40]);[.C40]+1;1))">
            <text:p/>
          </table:table-cell>
          <table:table-cell table:style-name="ce433" table:formula="of:=IF([.C41]&gt;[.$D$9];&quot;&quot;;PMT([.$D$7];[.$D$9];[.$D$3])*-1)">
            <text:p/>
          </table:table-cell>
          <table:table-cell table:style-name="ce433" table:formula="of:=IF([.C41]&gt;[.$D$9];&quot;&quot;;[.$D$7]*[.G40])">
            <text:p/>
          </table:table-cell>
          <table:table-cell table:style-name="ce439" table:formula="of:=IF([.C41]&gt;[.$D$9];&quot;&quot;;[.D41]-[.E41])">
            <text:p/>
          </table:table-cell>
          <table:table-cell table:style-name="ce433" table:formula="of:=IF([.C41]&gt;[.$D$9];&quot;&quot;;[.G40]-[.F41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1]=[.$D$9];[.C41]=&quot;&quot;);&quot;&quot;;IF(ISNUMBER([.C41]);[.C41]+1;1))">
            <text:p/>
          </table:table-cell>
          <table:table-cell table:style-name="ce433" table:formula="of:=IF([.C42]&gt;[.$D$9];&quot;&quot;;PMT([.$D$7];[.$D$9];[.$D$3])*-1)">
            <text:p/>
          </table:table-cell>
          <table:table-cell table:style-name="ce433" table:formula="of:=IF([.C42]&gt;[.$D$9];&quot;&quot;;[.$D$7]*[.G41])">
            <text:p/>
          </table:table-cell>
          <table:table-cell table:style-name="ce439" table:formula="of:=IF([.C42]&gt;[.$D$9];&quot;&quot;;[.D42]-[.E42])">
            <text:p/>
          </table:table-cell>
          <table:table-cell table:style-name="ce433" table:formula="of:=IF([.C42]&gt;[.$D$9];&quot;&quot;;[.G41]-[.F42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2]=[.$D$9];[.C42]=&quot;&quot;);&quot;&quot;;IF(ISNUMBER([.C42]);[.C42]+1;1))">
            <text:p/>
          </table:table-cell>
          <table:table-cell table:style-name="ce433" table:formula="of:=IF([.C43]&gt;[.$D$9];&quot;&quot;;PMT([.$D$7];[.$D$9];[.$D$3])*-1)">
            <text:p/>
          </table:table-cell>
          <table:table-cell table:style-name="ce433" table:formula="of:=IF([.C43]&gt;[.$D$9];&quot;&quot;;[.$D$7]*[.G42])">
            <text:p/>
          </table:table-cell>
          <table:table-cell table:style-name="ce439" table:formula="of:=IF([.C43]&gt;[.$D$9];&quot;&quot;;[.D43]-[.E43])">
            <text:p/>
          </table:table-cell>
          <table:table-cell table:style-name="ce433" table:formula="of:=IF([.C43]&gt;[.$D$9];&quot;&quot;;[.G42]-[.F43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3]=[.$D$9];[.C43]=&quot;&quot;);&quot;&quot;;IF(ISNUMBER([.C43]);[.C43]+1;1))">
            <text:p/>
          </table:table-cell>
          <table:table-cell table:style-name="ce433" table:formula="of:=IF([.C44]&gt;[.$D$9];&quot;&quot;;PMT([.$D$7];[.$D$9];[.$D$3])*-1)">
            <text:p/>
          </table:table-cell>
          <table:table-cell table:style-name="ce433" table:formula="of:=IF([.C44]&gt;[.$D$9];&quot;&quot;;[.$D$7]*[.G43])">
            <text:p/>
          </table:table-cell>
          <table:table-cell table:style-name="ce439" table:formula="of:=IF([.C44]&gt;[.$D$9];&quot;&quot;;[.D44]-[.E44])">
            <text:p/>
          </table:table-cell>
          <table:table-cell table:style-name="ce433" table:formula="of:=IF([.C44]&gt;[.$D$9];&quot;&quot;;[.G43]-[.F44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4]=[.$D$9];[.C44]=&quot;&quot;);&quot;&quot;;IF(ISNUMBER([.C44]);[.C44]+1;1))">
            <text:p/>
          </table:table-cell>
          <table:table-cell table:style-name="ce433" table:formula="of:=IF([.C45]&gt;[.$D$9];&quot;&quot;;PMT([.$D$7];[.$D$9];[.$D$3])*-1)">
            <text:p/>
          </table:table-cell>
          <table:table-cell table:style-name="ce433" table:formula="of:=IF([.C45]&gt;[.$D$9];&quot;&quot;;[.$D$7]*[.G44])">
            <text:p/>
          </table:table-cell>
          <table:table-cell table:style-name="ce439" table:formula="of:=IF([.C45]&gt;[.$D$9];&quot;&quot;;[.D45]-[.E45])">
            <text:p/>
          </table:table-cell>
          <table:table-cell table:style-name="ce433" table:formula="of:=IF([.C45]&gt;[.$D$9];&quot;&quot;;[.G44]-[.F45])">
            <text:p/>
          </table:table-cell>
          <table:table-cell table:number-columns-repeated="16377"/>
        </table:table-row>
        <table:table-row table:style-name="ro20">
          <table:table-cell table:style-name="ce414"/>
          <table:table-cell/>
          <table:table-cell table:style-name="ce422" table:formula="of:=IF(OR([.C45]=[.$D$9];[.C45]=&quot;&quot;);&quot;&quot;;IF(ISNUMBER([.C45]);[.C45]+1;1))">
            <text:p/>
          </table:table-cell>
          <table:table-cell table:style-name="ce433" table:formula="of:=IF([.C46]&gt;[.$D$9];&quot;&quot;;PMT([.$D$7];[.$D$9];[.$D$3])*-1)">
            <text:p/>
          </table:table-cell>
          <table:table-cell table:style-name="ce433" table:formula="of:=IF([.C46]&gt;[.$D$9];&quot;&quot;;[.$D$7]*[.G45])">
            <text:p/>
          </table:table-cell>
          <table:table-cell table:style-name="ce439" table:formula="of:=IF([.C46]&gt;[.$D$9];&quot;&quot;;[.D46]-[.E46])">
            <text:p/>
          </table:table-cell>
          <table:table-cell table:style-name="ce433" table:formula="of:=IF([.C46]&gt;[.$D$9];&quot;&quot;;[.G45]-[.F4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2" table:formula="of:=IF(OR([.C46]=[.$D$9];[.C46]=&quot;&quot;);&quot;&quot;;IF(ISNUMBER([.C46]);[.C46]+1;1))">
            <text:p/>
          </table:table-cell>
          <table:table-cell table:style-name="ce433" table:formula="of:=IF([.C47]&gt;[.$D$9];&quot;&quot;;PMT([.$D$7];[.$D$9];[.$D$3])*-1)">
            <text:p/>
          </table:table-cell>
          <table:table-cell table:style-name="ce433" table:formula="of:=IF([.C47]&gt;[.$D$9];&quot;&quot;;[.$D$7]*[.G46])">
            <text:p/>
          </table:table-cell>
          <table:table-cell table:style-name="ce439" table:formula="of:=IF([.C47]&gt;[.$D$9];&quot;&quot;;[.D47]-[.E47])">
            <text:p/>
          </table:table-cell>
          <table:table-cell table:style-name="ce433" table:formula="of:=IF([.C47]&gt;[.$D$9];&quot;&quot;;[.G46]-[.F4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47]=[.$D$9];[.C47]=&quot;&quot;);&quot;&quot;;IF(ISNUMBER([.C47]);[.C47]+1;1))">
            <text:p/>
          </table:table-cell>
          <table:table-cell table:style-name="ce433" table:formula="of:=IF([.C48]&gt;[.$D$9];&quot;&quot;;PMT([.$D$7];[.$D$9];[.$D$3])*-1)">
            <text:p/>
          </table:table-cell>
          <table:table-cell table:style-name="ce433" table:formula="of:=IF([.C48]&gt;[.$D$9];&quot;&quot;;[.$D$7]*[.G47])">
            <text:p/>
          </table:table-cell>
          <table:table-cell table:style-name="ce439" table:formula="of:=IF([.C48]&gt;[.$D$9];&quot;&quot;;[.D48]-[.E48])">
            <text:p/>
          </table:table-cell>
          <table:table-cell table:style-name="ce433" table:formula="of:=IF([.C48]&gt;[.$D$9];&quot;&quot;;[.G47]-[.F4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48]=[.$D$9];[.C48]=&quot;&quot;);&quot;&quot;;IF(ISNUMBER([.C48]);[.C48]+1;1))">
            <text:p/>
          </table:table-cell>
          <table:table-cell table:style-name="ce433" table:formula="of:=IF([.C49]&gt;[.$D$9];&quot;&quot;;PMT([.$D$7];[.$D$9];[.$D$3])*-1)">
            <text:p/>
          </table:table-cell>
          <table:table-cell table:style-name="ce433" table:formula="of:=IF([.C49]&gt;[.$D$9];&quot;&quot;;[.$D$7]*[.G48])">
            <text:p/>
          </table:table-cell>
          <table:table-cell table:style-name="ce439" table:formula="of:=IF([.C49]&gt;[.$D$9];&quot;&quot;;[.D49]-[.E49])">
            <text:p/>
          </table:table-cell>
          <table:table-cell table:style-name="ce433" table:formula="of:=IF([.C49]&gt;[.$D$9];&quot;&quot;;[.G48]-[.F4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49]=[.$D$9];[.C49]=&quot;&quot;);&quot;&quot;;IF(ISNUMBER([.C49]);[.C49]+1;1))">
            <text:p/>
          </table:table-cell>
          <table:table-cell table:style-name="ce433" table:formula="of:=IF([.C50]&gt;[.$D$9];&quot;&quot;;PMT([.$D$7];[.$D$9];[.$D$3])*-1)">
            <text:p/>
          </table:table-cell>
          <table:table-cell table:style-name="ce433" table:formula="of:=IF([.C50]&gt;[.$D$9];&quot;&quot;;[.$D$7]*[.G49])">
            <text:p/>
          </table:table-cell>
          <table:table-cell table:style-name="ce439" table:formula="of:=IF([.C50]&gt;[.$D$9];&quot;&quot;;[.D50]-[.E50])">
            <text:p/>
          </table:table-cell>
          <table:table-cell table:style-name="ce433" table:formula="of:=IF([.C50]&gt;[.$D$9];&quot;&quot;;[.G49]-[.F5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0]=[.$D$9];[.C50]=&quot;&quot;);&quot;&quot;;IF(ISNUMBER([.C50]);[.C50]+1;1))">
            <text:p/>
          </table:table-cell>
          <table:table-cell table:style-name="ce433" table:formula="of:=IF([.C51]&gt;[.$D$9];&quot;&quot;;PMT([.$D$7];[.$D$9];[.$D$3])*-1)">
            <text:p/>
          </table:table-cell>
          <table:table-cell table:style-name="ce433" table:formula="of:=IF([.C51]&gt;[.$D$9];&quot;&quot;;[.$D$7]*[.G50])">
            <text:p/>
          </table:table-cell>
          <table:table-cell table:style-name="ce439" table:formula="of:=IF([.C51]&gt;[.$D$9];&quot;&quot;;[.D51]-[.E51])">
            <text:p/>
          </table:table-cell>
          <table:table-cell table:style-name="ce433" table:formula="of:=IF([.C51]&gt;[.$D$9];&quot;&quot;;[.G50]-[.F5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1]=[.$D$9];[.C51]=&quot;&quot;);&quot;&quot;;IF(ISNUMBER([.C51]);[.C51]+1;1))">
            <text:p/>
          </table:table-cell>
          <table:table-cell table:style-name="ce433" table:formula="of:=IF([.C52]&gt;[.$D$9];&quot;&quot;;PMT([.$D$7];[.$D$9];[.$D$3])*-1)">
            <text:p/>
          </table:table-cell>
          <table:table-cell table:style-name="ce433" table:formula="of:=IF([.C52]&gt;[.$D$9];&quot;&quot;;[.$D$7]*[.G51])">
            <text:p/>
          </table:table-cell>
          <table:table-cell table:style-name="ce439" table:formula="of:=IF([.C52]&gt;[.$D$9];&quot;&quot;;[.D52]-[.E52])">
            <text:p/>
          </table:table-cell>
          <table:table-cell table:style-name="ce433" table:formula="of:=IF([.C52]&gt;[.$D$9];&quot;&quot;;[.G51]-[.F5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2]=[.$D$9];[.C52]=&quot;&quot;);&quot;&quot;;IF(ISNUMBER([.C52]);[.C52]+1;1))">
            <text:p/>
          </table:table-cell>
          <table:table-cell table:style-name="ce433" table:formula="of:=IF([.C53]&gt;[.$D$9];&quot;&quot;;PMT([.$D$7];[.$D$9];[.$D$3])*-1)">
            <text:p/>
          </table:table-cell>
          <table:table-cell table:style-name="ce433" table:formula="of:=IF([.C53]&gt;[.$D$9];&quot;&quot;;[.$D$7]*[.G52])">
            <text:p/>
          </table:table-cell>
          <table:table-cell table:style-name="ce439" table:formula="of:=IF([.C53]&gt;[.$D$9];&quot;&quot;;[.D53]-[.E53])">
            <text:p/>
          </table:table-cell>
          <table:table-cell table:style-name="ce433" table:formula="of:=IF([.C53]&gt;[.$D$9];&quot;&quot;;[.G52]-[.F5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3]=[.$D$9];[.C53]=&quot;&quot;);&quot;&quot;;IF(ISNUMBER([.C53]);[.C53]+1;1))">
            <text:p/>
          </table:table-cell>
          <table:table-cell table:style-name="ce433" table:formula="of:=IF([.C54]&gt;[.$D$9];&quot;&quot;;PMT([.$D$7];[.$D$9];[.$D$3])*-1)">
            <text:p/>
          </table:table-cell>
          <table:table-cell table:style-name="ce433" table:formula="of:=IF([.C54]&gt;[.$D$9];&quot;&quot;;[.$D$7]*[.G53])">
            <text:p/>
          </table:table-cell>
          <table:table-cell table:style-name="ce439" table:formula="of:=IF([.C54]&gt;[.$D$9];&quot;&quot;;[.D54]-[.E54])">
            <text:p/>
          </table:table-cell>
          <table:table-cell table:style-name="ce433" table:formula="of:=IF([.C54]&gt;[.$D$9];&quot;&quot;;[.G53]-[.F5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4]=[.$D$9];[.C54]=&quot;&quot;);&quot;&quot;;IF(ISNUMBER([.C54]);[.C54]+1;1))">
            <text:p/>
          </table:table-cell>
          <table:table-cell table:style-name="ce433" table:formula="of:=IF([.C55]&gt;[.$D$9];&quot;&quot;;PMT([.$D$7];[.$D$9];[.$D$3])*-1)">
            <text:p/>
          </table:table-cell>
          <table:table-cell table:style-name="ce433" table:formula="of:=IF([.C55]&gt;[.$D$9];&quot;&quot;;[.$D$7]*[.G54])">
            <text:p/>
          </table:table-cell>
          <table:table-cell table:style-name="ce439" table:formula="of:=IF([.C55]&gt;[.$D$9];&quot;&quot;;[.D55]-[.E55])">
            <text:p/>
          </table:table-cell>
          <table:table-cell table:style-name="ce433" table:formula="of:=IF([.C55]&gt;[.$D$9];&quot;&quot;;[.G54]-[.F5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5]=[.$D$9];[.C55]=&quot;&quot;);&quot;&quot;;IF(ISNUMBER([.C55]);[.C55]+1;1))">
            <text:p/>
          </table:table-cell>
          <table:table-cell table:style-name="ce433" table:formula="of:=IF([.C56]&gt;[.$D$9];&quot;&quot;;PMT([.$D$7];[.$D$9];[.$D$3])*-1)">
            <text:p/>
          </table:table-cell>
          <table:table-cell table:style-name="ce433" table:formula="of:=IF([.C56]&gt;[.$D$9];&quot;&quot;;[.$D$7]*[.G55])">
            <text:p/>
          </table:table-cell>
          <table:table-cell table:style-name="ce439" table:formula="of:=IF([.C56]&gt;[.$D$9];&quot;&quot;;[.D56]-[.E56])">
            <text:p/>
          </table:table-cell>
          <table:table-cell table:style-name="ce433" table:formula="of:=IF([.C56]&gt;[.$D$9];&quot;&quot;;[.G55]-[.F5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6]=[.$D$9];[.C56]=&quot;&quot;);&quot;&quot;;IF(ISNUMBER([.C56]);[.C56]+1;1))">
            <text:p/>
          </table:table-cell>
          <table:table-cell table:style-name="ce433" table:formula="of:=IF([.C57]&gt;[.$D$9];&quot;&quot;;PMT([.$D$7];[.$D$9];[.$D$3])*-1)">
            <text:p/>
          </table:table-cell>
          <table:table-cell table:style-name="ce433" table:formula="of:=IF([.C57]&gt;[.$D$9];&quot;&quot;;[.$D$7]*[.G56])">
            <text:p/>
          </table:table-cell>
          <table:table-cell table:style-name="ce439" table:formula="of:=IF([.C57]&gt;[.$D$9];&quot;&quot;;[.D57]-[.E57])">
            <text:p/>
          </table:table-cell>
          <table:table-cell table:style-name="ce433" table:formula="of:=IF([.C57]&gt;[.$D$9];&quot;&quot;;[.G56]-[.F5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7]=[.$D$9];[.C57]=&quot;&quot;);&quot;&quot;;IF(ISNUMBER([.C57]);[.C57]+1;1))">
            <text:p/>
          </table:table-cell>
          <table:table-cell table:style-name="ce433" table:formula="of:=IF([.C58]&gt;[.$D$9];&quot;&quot;;PMT([.$D$7];[.$D$9];[.$D$3])*-1)">
            <text:p/>
          </table:table-cell>
          <table:table-cell table:style-name="ce433" table:formula="of:=IF([.C58]&gt;[.$D$9];&quot;&quot;;[.$D$7]*[.G57])">
            <text:p/>
          </table:table-cell>
          <table:table-cell table:style-name="ce439" table:formula="of:=IF([.C58]&gt;[.$D$9];&quot;&quot;;[.D58]-[.E58])">
            <text:p/>
          </table:table-cell>
          <table:table-cell table:style-name="ce433" table:formula="of:=IF([.C58]&gt;[.$D$9];&quot;&quot;;[.G57]-[.F5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8]=[.$D$9];[.C58]=&quot;&quot;);&quot;&quot;;IF(ISNUMBER([.C58]);[.C58]+1;1))">
            <text:p/>
          </table:table-cell>
          <table:table-cell table:style-name="ce433" table:formula="of:=IF([.C59]&gt;[.$D$9];&quot;&quot;;PMT([.$D$7];[.$D$9];[.$D$3])*-1)">
            <text:p/>
          </table:table-cell>
          <table:table-cell table:style-name="ce433" table:formula="of:=IF([.C59]&gt;[.$D$9];&quot;&quot;;[.$D$7]*[.G58])">
            <text:p/>
          </table:table-cell>
          <table:table-cell table:style-name="ce439" table:formula="of:=IF([.C59]&gt;[.$D$9];&quot;&quot;;[.D59]-[.E59])">
            <text:p/>
          </table:table-cell>
          <table:table-cell table:style-name="ce433" table:formula="of:=IF([.C59]&gt;[.$D$9];&quot;&quot;;[.G58]-[.F5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59]=[.$D$9];[.C59]=&quot;&quot;);&quot;&quot;;IF(ISNUMBER([.C59]);[.C59]+1;1))">
            <text:p/>
          </table:table-cell>
          <table:table-cell table:style-name="ce433" table:formula="of:=IF([.C60]&gt;[.$D$9];&quot;&quot;;PMT([.$D$7];[.$D$9];[.$D$3])*-1)">
            <text:p/>
          </table:table-cell>
          <table:table-cell table:style-name="ce433" table:formula="of:=IF([.C60]&gt;[.$D$9];&quot;&quot;;[.$D$7]*[.G59])">
            <text:p/>
          </table:table-cell>
          <table:table-cell table:style-name="ce439" table:formula="of:=IF([.C60]&gt;[.$D$9];&quot;&quot;;[.D60]-[.E60])">
            <text:p/>
          </table:table-cell>
          <table:table-cell table:style-name="ce433" table:formula="of:=IF([.C60]&gt;[.$D$9];&quot;&quot;;[.G59]-[.F6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0]=[.$D$9];[.C60]=&quot;&quot;);&quot;&quot;;IF(ISNUMBER([.C60]);[.C60]+1;1))">
            <text:p/>
          </table:table-cell>
          <table:table-cell table:style-name="ce433" table:formula="of:=IF([.C61]&gt;[.$D$9];&quot;&quot;;PMT([.$D$7];[.$D$9];[.$D$3])*-1)">
            <text:p/>
          </table:table-cell>
          <table:table-cell table:style-name="ce433" table:formula="of:=IF([.C61]&gt;[.$D$9];&quot;&quot;;[.$D$7]*[.G60])">
            <text:p/>
          </table:table-cell>
          <table:table-cell table:style-name="ce439" table:formula="of:=IF([.C61]&gt;[.$D$9];&quot;&quot;;[.D61]-[.E61])">
            <text:p/>
          </table:table-cell>
          <table:table-cell table:style-name="ce433" table:formula="of:=IF([.C61]&gt;[.$D$9];&quot;&quot;;[.G60]-[.F6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1]=[.$D$9];[.C61]=&quot;&quot;);&quot;&quot;;IF(ISNUMBER([.C61]);[.C61]+1;1))">
            <text:p/>
          </table:table-cell>
          <table:table-cell table:style-name="ce433" table:formula="of:=IF([.C62]&gt;[.$D$9];&quot;&quot;;PMT([.$D$7];[.$D$9];[.$D$3])*-1)">
            <text:p/>
          </table:table-cell>
          <table:table-cell table:style-name="ce433" table:formula="of:=IF([.C62]&gt;[.$D$9];&quot;&quot;;[.$D$7]*[.G61])">
            <text:p/>
          </table:table-cell>
          <table:table-cell table:style-name="ce439" table:formula="of:=IF([.C62]&gt;[.$D$9];&quot;&quot;;[.D62]-[.E62])">
            <text:p/>
          </table:table-cell>
          <table:table-cell table:style-name="ce433" table:formula="of:=IF([.C62]&gt;[.$D$9];&quot;&quot;;[.G61]-[.F6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2]=[.$D$9];[.C62]=&quot;&quot;);&quot;&quot;;IF(ISNUMBER([.C62]);[.C62]+1;1))">
            <text:p/>
          </table:table-cell>
          <table:table-cell table:style-name="ce433" table:formula="of:=IF([.C63]&gt;[.$D$9];&quot;&quot;;PMT([.$D$7];[.$D$9];[.$D$3])*-1)">
            <text:p/>
          </table:table-cell>
          <table:table-cell table:style-name="ce433" table:formula="of:=IF([.C63]&gt;[.$D$9];&quot;&quot;;[.$D$7]*[.G62])">
            <text:p/>
          </table:table-cell>
          <table:table-cell table:style-name="ce439" table:formula="of:=IF([.C63]&gt;[.$D$9];&quot;&quot;;[.D63]-[.E63])">
            <text:p/>
          </table:table-cell>
          <table:table-cell table:style-name="ce433" table:formula="of:=IF([.C63]&gt;[.$D$9];&quot;&quot;;[.G62]-[.F6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3]=[.$D$9];[.C63]=&quot;&quot;);&quot;&quot;;IF(ISNUMBER([.C63]);[.C63]+1;1))">
            <text:p/>
          </table:table-cell>
          <table:table-cell table:style-name="ce433" table:formula="of:=IF([.C64]&gt;[.$D$9];&quot;&quot;;PMT([.$D$7];[.$D$9];[.$D$3])*-1)">
            <text:p/>
          </table:table-cell>
          <table:table-cell table:style-name="ce433" table:formula="of:=IF([.C64]&gt;[.$D$9];&quot;&quot;;[.$D$7]*[.G63])">
            <text:p/>
          </table:table-cell>
          <table:table-cell table:style-name="ce439" table:formula="of:=IF([.C64]&gt;[.$D$9];&quot;&quot;;[.D64]-[.E64])">
            <text:p/>
          </table:table-cell>
          <table:table-cell table:style-name="ce433" table:formula="of:=IF([.C64]&gt;[.$D$9];&quot;&quot;;[.G63]-[.F6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4]=[.$D$9];[.C64]=&quot;&quot;);&quot;&quot;;IF(ISNUMBER([.C64]);[.C64]+1;1))">
            <text:p/>
          </table:table-cell>
          <table:table-cell table:style-name="ce433" table:formula="of:=IF([.C65]&gt;[.$D$9];&quot;&quot;;PMT([.$D$7];[.$D$9];[.$D$3])*-1)">
            <text:p/>
          </table:table-cell>
          <table:table-cell table:style-name="ce433" table:formula="of:=IF([.C65]&gt;[.$D$9];&quot;&quot;;[.$D$7]*[.G64])">
            <text:p/>
          </table:table-cell>
          <table:table-cell table:style-name="ce439" table:formula="of:=IF([.C65]&gt;[.$D$9];&quot;&quot;;[.D65]-[.E65])">
            <text:p/>
          </table:table-cell>
          <table:table-cell table:style-name="ce433" table:formula="of:=IF([.C65]&gt;[.$D$9];&quot;&quot;;[.G64]-[.F6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5]=[.$D$9];[.C65]=&quot;&quot;);&quot;&quot;;IF(ISNUMBER([.C65]);[.C65]+1;1))">
            <text:p/>
          </table:table-cell>
          <table:table-cell table:style-name="ce433" table:formula="of:=IF([.C66]&gt;[.$D$9];&quot;&quot;;PMT([.$D$7];[.$D$9];[.$D$3])*-1)">
            <text:p/>
          </table:table-cell>
          <table:table-cell table:style-name="ce433" table:formula="of:=IF([.C66]&gt;[.$D$9];&quot;&quot;;[.$D$7]*[.G65])">
            <text:p/>
          </table:table-cell>
          <table:table-cell table:style-name="ce439" table:formula="of:=IF([.C66]&gt;[.$D$9];&quot;&quot;;[.D66]-[.E66])">
            <text:p/>
          </table:table-cell>
          <table:table-cell table:style-name="ce433" table:formula="of:=IF([.C66]&gt;[.$D$9];&quot;&quot;;[.G65]-[.F6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6]=[.$D$9];[.C66]=&quot;&quot;);&quot;&quot;;IF(ISNUMBER([.C66]);[.C66]+1;1))">
            <text:p/>
          </table:table-cell>
          <table:table-cell table:style-name="ce433" table:formula="of:=IF([.C67]&gt;[.$D$9];&quot;&quot;;PMT([.$D$7];[.$D$9];[.$D$3])*-1)">
            <text:p/>
          </table:table-cell>
          <table:table-cell table:style-name="ce433" table:formula="of:=IF([.C67]&gt;[.$D$9];&quot;&quot;;[.$D$7]*[.G66])">
            <text:p/>
          </table:table-cell>
          <table:table-cell table:style-name="ce439" table:formula="of:=IF([.C67]&gt;[.$D$9];&quot;&quot;;[.D67]-[.E67])">
            <text:p/>
          </table:table-cell>
          <table:table-cell table:style-name="ce433" table:formula="of:=IF([.C67]&gt;[.$D$9];&quot;&quot;;[.G66]-[.F6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7]=[.$D$9];[.C67]=&quot;&quot;);&quot;&quot;;IF(ISNUMBER([.C67]);[.C67]+1;1))">
            <text:p/>
          </table:table-cell>
          <table:table-cell table:style-name="ce433" table:formula="of:=IF([.C68]&gt;[.$D$9];&quot;&quot;;PMT([.$D$7];[.$D$9];[.$D$3])*-1)">
            <text:p/>
          </table:table-cell>
          <table:table-cell table:style-name="ce433" table:formula="of:=IF([.C68]&gt;[.$D$9];&quot;&quot;;[.$D$7]*[.G67])">
            <text:p/>
          </table:table-cell>
          <table:table-cell table:style-name="ce439" table:formula="of:=IF([.C68]&gt;[.$D$9];&quot;&quot;;[.D68]-[.E68])">
            <text:p/>
          </table:table-cell>
          <table:table-cell table:style-name="ce433" table:formula="of:=IF([.C68]&gt;[.$D$9];&quot;&quot;;[.G67]-[.F6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8]=[.$D$9];[.C68]=&quot;&quot;);&quot;&quot;;IF(ISNUMBER([.C68]);[.C68]+1;1))">
            <text:p/>
          </table:table-cell>
          <table:table-cell table:style-name="ce433" table:formula="of:=IF([.C69]&gt;[.$D$9];&quot;&quot;;PMT([.$D$7];[.$D$9];[.$D$3])*-1)">
            <text:p/>
          </table:table-cell>
          <table:table-cell table:style-name="ce433" table:formula="of:=IF([.C69]&gt;[.$D$9];&quot;&quot;;[.$D$7]*[.G68])">
            <text:p/>
          </table:table-cell>
          <table:table-cell table:style-name="ce439" table:formula="of:=IF([.C69]&gt;[.$D$9];&quot;&quot;;[.D69]-[.E69])">
            <text:p/>
          </table:table-cell>
          <table:table-cell table:style-name="ce433" table:formula="of:=IF([.C69]&gt;[.$D$9];&quot;&quot;;[.G68]-[.F6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69]=[.$D$9];[.C69]=&quot;&quot;);&quot;&quot;;IF(ISNUMBER([.C69]);[.C69]+1;1))">
            <text:p/>
          </table:table-cell>
          <table:table-cell table:style-name="ce433" table:formula="of:=IF([.C70]&gt;[.$D$9];&quot;&quot;;PMT([.$D$7];[.$D$9];[.$D$3])*-1)">
            <text:p/>
          </table:table-cell>
          <table:table-cell table:style-name="ce433" table:formula="of:=IF([.C70]&gt;[.$D$9];&quot;&quot;;[.$D$7]*[.G69])">
            <text:p/>
          </table:table-cell>
          <table:table-cell table:style-name="ce439" table:formula="of:=IF([.C70]&gt;[.$D$9];&quot;&quot;;[.D70]-[.E70])">
            <text:p/>
          </table:table-cell>
          <table:table-cell table:style-name="ce433" table:formula="of:=IF([.C70]&gt;[.$D$9];&quot;&quot;;[.G69]-[.F7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0]=[.$D$9];[.C70]=&quot;&quot;);&quot;&quot;;IF(ISNUMBER([.C70]);[.C70]+1;1))">
            <text:p/>
          </table:table-cell>
          <table:table-cell table:style-name="ce433" table:formula="of:=IF([.C71]&gt;[.$D$9];&quot;&quot;;PMT([.$D$7];[.$D$9];[.$D$3])*-1)">
            <text:p/>
          </table:table-cell>
          <table:table-cell table:style-name="ce433" table:formula="of:=IF([.C71]&gt;[.$D$9];&quot;&quot;;[.$D$7]*[.G70])">
            <text:p/>
          </table:table-cell>
          <table:table-cell table:style-name="ce439" table:formula="of:=IF([.C71]&gt;[.$D$9];&quot;&quot;;[.D71]-[.E71])">
            <text:p/>
          </table:table-cell>
          <table:table-cell table:style-name="ce433" table:formula="of:=IF([.C71]&gt;[.$D$9];&quot;&quot;;[.G70]-[.F7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1]=[.$D$9];[.C71]=&quot;&quot;);&quot;&quot;;IF(ISNUMBER([.C71]);[.C71]+1;1))">
            <text:p/>
          </table:table-cell>
          <table:table-cell table:style-name="ce433" table:formula="of:=IF([.C72]&gt;[.$D$9];&quot;&quot;;PMT([.$D$7];[.$D$9];[.$D$3])*-1)">
            <text:p/>
          </table:table-cell>
          <table:table-cell table:style-name="ce433" table:formula="of:=IF([.C72]&gt;[.$D$9];&quot;&quot;;[.$D$7]*[.G71])">
            <text:p/>
          </table:table-cell>
          <table:table-cell table:style-name="ce439" table:formula="of:=IF([.C72]&gt;[.$D$9];&quot;&quot;;[.D72]-[.E72])">
            <text:p/>
          </table:table-cell>
          <table:table-cell table:style-name="ce433" table:formula="of:=IF([.C72]&gt;[.$D$9];&quot;&quot;;[.G71]-[.F7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2]=[.$D$9];[.C72]=&quot;&quot;);&quot;&quot;;IF(ISNUMBER([.C72]);[.C72]+1;1))">
            <text:p/>
          </table:table-cell>
          <table:table-cell table:style-name="ce433" table:formula="of:=IF([.C73]&gt;[.$D$9];&quot;&quot;;PMT([.$D$7];[.$D$9];[.$D$3])*-1)">
            <text:p/>
          </table:table-cell>
          <table:table-cell table:style-name="ce433" table:formula="of:=IF([.C73]&gt;[.$D$9];&quot;&quot;;[.$D$7]*[.G72])">
            <text:p/>
          </table:table-cell>
          <table:table-cell table:style-name="ce439" table:formula="of:=IF([.C73]&gt;[.$D$9];&quot;&quot;;[.D73]-[.E73])">
            <text:p/>
          </table:table-cell>
          <table:table-cell table:style-name="ce433" table:formula="of:=IF([.C73]&gt;[.$D$9];&quot;&quot;;[.G72]-[.F7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3]=[.$D$9];[.C73]=&quot;&quot;);&quot;&quot;;IF(ISNUMBER([.C73]);[.C73]+1;1))">
            <text:p/>
          </table:table-cell>
          <table:table-cell table:style-name="ce433" table:formula="of:=IF([.C74]&gt;[.$D$9];&quot;&quot;;PMT([.$D$7];[.$D$9];[.$D$3])*-1)">
            <text:p/>
          </table:table-cell>
          <table:table-cell table:style-name="ce433" table:formula="of:=IF([.C74]&gt;[.$D$9];&quot;&quot;;[.$D$7]*[.G73])">
            <text:p/>
          </table:table-cell>
          <table:table-cell table:style-name="ce439" table:formula="of:=IF([.C74]&gt;[.$D$9];&quot;&quot;;[.D74]-[.E74])">
            <text:p/>
          </table:table-cell>
          <table:table-cell table:style-name="ce433" table:formula="of:=IF([.C74]&gt;[.$D$9];&quot;&quot;;[.G73]-[.F7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4]=[.$D$9];[.C74]=&quot;&quot;);&quot;&quot;;IF(ISNUMBER([.C74]);[.C74]+1;1))">
            <text:p/>
          </table:table-cell>
          <table:table-cell table:style-name="ce433" table:formula="of:=IF([.C75]&gt;[.$D$9];&quot;&quot;;PMT([.$D$7];[.$D$9];[.$D$3])*-1)">
            <text:p/>
          </table:table-cell>
          <table:table-cell table:style-name="ce433" table:formula="of:=IF([.C75]&gt;[.$D$9];&quot;&quot;;[.$D$7]*[.G74])">
            <text:p/>
          </table:table-cell>
          <table:table-cell table:style-name="ce439" table:formula="of:=IF([.C75]&gt;[.$D$9];&quot;&quot;;[.D75]-[.E75])">
            <text:p/>
          </table:table-cell>
          <table:table-cell table:style-name="ce433" table:formula="of:=IF([.C75]&gt;[.$D$9];&quot;&quot;;[.G74]-[.F7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5]=[.$D$9];[.C75]=&quot;&quot;);&quot;&quot;;IF(ISNUMBER([.C75]);[.C75]+1;1))">
            <text:p/>
          </table:table-cell>
          <table:table-cell table:style-name="ce433" table:formula="of:=IF([.C76]&gt;[.$D$9];&quot;&quot;;PMT([.$D$7];[.$D$9];[.$D$3])*-1)">
            <text:p/>
          </table:table-cell>
          <table:table-cell table:style-name="ce433" table:formula="of:=IF([.C76]&gt;[.$D$9];&quot;&quot;;[.$D$7]*[.G75])">
            <text:p/>
          </table:table-cell>
          <table:table-cell table:style-name="ce439" table:formula="of:=IF([.C76]&gt;[.$D$9];&quot;&quot;;[.D76]-[.E76])">
            <text:p/>
          </table:table-cell>
          <table:table-cell table:style-name="ce433" table:formula="of:=IF([.C76]&gt;[.$D$9];&quot;&quot;;[.G75]-[.F7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6]=[.$D$9];[.C76]=&quot;&quot;);&quot;&quot;;IF(ISNUMBER([.C76]);[.C76]+1;1))">
            <text:p/>
          </table:table-cell>
          <table:table-cell table:style-name="ce433" table:formula="of:=IF([.C77]&gt;[.$D$9];&quot;&quot;;PMT([.$D$7];[.$D$9];[.$D$3])*-1)">
            <text:p/>
          </table:table-cell>
          <table:table-cell table:style-name="ce433" table:formula="of:=IF([.C77]&gt;[.$D$9];&quot;&quot;;[.$D$7]*[.G76])">
            <text:p/>
          </table:table-cell>
          <table:table-cell table:style-name="ce439" table:formula="of:=IF([.C77]&gt;[.$D$9];&quot;&quot;;[.D77]-[.E77])">
            <text:p/>
          </table:table-cell>
          <table:table-cell table:style-name="ce433" table:formula="of:=IF([.C77]&gt;[.$D$9];&quot;&quot;;[.G76]-[.F7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7]=[.$D$9];[.C77]=&quot;&quot;);&quot;&quot;;IF(ISNUMBER([.C77]);[.C77]+1;1))">
            <text:p/>
          </table:table-cell>
          <table:table-cell table:style-name="ce433" table:formula="of:=IF([.C78]&gt;[.$D$9];&quot;&quot;;PMT([.$D$7];[.$D$9];[.$D$3])*-1)">
            <text:p/>
          </table:table-cell>
          <table:table-cell table:style-name="ce433" table:formula="of:=IF([.C78]&gt;[.$D$9];&quot;&quot;;[.$D$7]*[.G77])">
            <text:p/>
          </table:table-cell>
          <table:table-cell table:style-name="ce439" table:formula="of:=IF([.C78]&gt;[.$D$9];&quot;&quot;;[.D78]-[.E78])">
            <text:p/>
          </table:table-cell>
          <table:table-cell table:style-name="ce433" table:formula="of:=IF([.C78]&gt;[.$D$9];&quot;&quot;;[.G77]-[.F7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8]=[.$D$9];[.C78]=&quot;&quot;);&quot;&quot;;IF(ISNUMBER([.C78]);[.C78]+1;1))">
            <text:p/>
          </table:table-cell>
          <table:table-cell table:style-name="ce433" table:formula="of:=IF([.C79]&gt;[.$D$9];&quot;&quot;;PMT([.$D$7];[.$D$9];[.$D$3])*-1)">
            <text:p/>
          </table:table-cell>
          <table:table-cell table:style-name="ce433" table:formula="of:=IF([.C79]&gt;[.$D$9];&quot;&quot;;[.$D$7]*[.G78])">
            <text:p/>
          </table:table-cell>
          <table:table-cell table:style-name="ce439" table:formula="of:=IF([.C79]&gt;[.$D$9];&quot;&quot;;[.D79]-[.E79])">
            <text:p/>
          </table:table-cell>
          <table:table-cell table:style-name="ce433" table:formula="of:=IF([.C79]&gt;[.$D$9];&quot;&quot;;[.G78]-[.F7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79]=[.$D$9];[.C79]=&quot;&quot;);&quot;&quot;;IF(ISNUMBER([.C79]);[.C79]+1;1))">
            <text:p/>
          </table:table-cell>
          <table:table-cell table:style-name="ce433" table:formula="of:=IF([.C80]&gt;[.$D$9];&quot;&quot;;PMT([.$D$7];[.$D$9];[.$D$3])*-1)">
            <text:p/>
          </table:table-cell>
          <table:table-cell table:style-name="ce433" table:formula="of:=IF([.C80]&gt;[.$D$9];&quot;&quot;;[.$D$7]*[.G79])">
            <text:p/>
          </table:table-cell>
          <table:table-cell table:style-name="ce439" table:formula="of:=IF([.C80]&gt;[.$D$9];&quot;&quot;;[.D80]-[.E80])">
            <text:p/>
          </table:table-cell>
          <table:table-cell table:style-name="ce433" table:formula="of:=IF([.C80]&gt;[.$D$9];&quot;&quot;;[.G79]-[.F8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0]=[.$D$9];[.C80]=&quot;&quot;);&quot;&quot;;IF(ISNUMBER([.C80]);[.C80]+1;1))">
            <text:p/>
          </table:table-cell>
          <table:table-cell table:style-name="ce433" table:formula="of:=IF([.C81]&gt;[.$D$9];&quot;&quot;;PMT([.$D$7];[.$D$9];[.$D$3])*-1)">
            <text:p/>
          </table:table-cell>
          <table:table-cell table:style-name="ce433" table:formula="of:=IF([.C81]&gt;[.$D$9];&quot;&quot;;[.$D$7]*[.G80])">
            <text:p/>
          </table:table-cell>
          <table:table-cell table:style-name="ce439" table:formula="of:=IF([.C81]&gt;[.$D$9];&quot;&quot;;[.D81]-[.E81])">
            <text:p/>
          </table:table-cell>
          <table:table-cell table:style-name="ce433" table:formula="of:=IF([.C81]&gt;[.$D$9];&quot;&quot;;[.G80]-[.F8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1]=[.$D$9];[.C81]=&quot;&quot;);&quot;&quot;;IF(ISNUMBER([.C81]);[.C81]+1;1))">
            <text:p/>
          </table:table-cell>
          <table:table-cell table:style-name="ce433" table:formula="of:=IF([.C82]&gt;[.$D$9];&quot;&quot;;PMT([.$D$7];[.$D$9];[.$D$3])*-1)">
            <text:p/>
          </table:table-cell>
          <table:table-cell table:style-name="ce433" table:formula="of:=IF([.C82]&gt;[.$D$9];&quot;&quot;;[.$D$7]*[.G81])">
            <text:p/>
          </table:table-cell>
          <table:table-cell table:style-name="ce439" table:formula="of:=IF([.C82]&gt;[.$D$9];&quot;&quot;;[.D82]-[.E82])">
            <text:p/>
          </table:table-cell>
          <table:table-cell table:style-name="ce433" table:formula="of:=IF([.C82]&gt;[.$D$9];&quot;&quot;;[.G81]-[.F8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2]=[.$D$9];[.C82]=&quot;&quot;);&quot;&quot;;IF(ISNUMBER([.C82]);[.C82]+1;1))">
            <text:p/>
          </table:table-cell>
          <table:table-cell table:style-name="ce433" table:formula="of:=IF([.C83]&gt;[.$D$9];&quot;&quot;;PMT([.$D$7];[.$D$9];[.$D$3])*-1)">
            <text:p/>
          </table:table-cell>
          <table:table-cell table:style-name="ce433" table:formula="of:=IF([.C83]&gt;[.$D$9];&quot;&quot;;[.$D$7]*[.G82])">
            <text:p/>
          </table:table-cell>
          <table:table-cell table:style-name="ce439" table:formula="of:=IF([.C83]&gt;[.$D$9];&quot;&quot;;[.D83]-[.E83])">
            <text:p/>
          </table:table-cell>
          <table:table-cell table:style-name="ce433" table:formula="of:=IF([.C83]&gt;[.$D$9];&quot;&quot;;[.G82]-[.F8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3]=[.$D$9];[.C83]=&quot;&quot;);&quot;&quot;;IF(ISNUMBER([.C83]);[.C83]+1;1))">
            <text:p/>
          </table:table-cell>
          <table:table-cell table:style-name="ce433" table:formula="of:=IF([.C84]&gt;[.$D$9];&quot;&quot;;PMT([.$D$7];[.$D$9];[.$D$3])*-1)">
            <text:p/>
          </table:table-cell>
          <table:table-cell table:style-name="ce433" table:formula="of:=IF([.C84]&gt;[.$D$9];&quot;&quot;;[.$D$7]*[.G83])">
            <text:p/>
          </table:table-cell>
          <table:table-cell table:style-name="ce439" table:formula="of:=IF([.C84]&gt;[.$D$9];&quot;&quot;;[.D84]-[.E84])">
            <text:p/>
          </table:table-cell>
          <table:table-cell table:style-name="ce433" table:formula="of:=IF([.C84]&gt;[.$D$9];&quot;&quot;;[.G83]-[.F8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4]=[.$D$9];[.C84]=&quot;&quot;);&quot;&quot;;IF(ISNUMBER([.C84]);[.C84]+1;1))">
            <text:p/>
          </table:table-cell>
          <table:table-cell table:style-name="ce433" table:formula="of:=IF([.C85]&gt;[.$D$9];&quot;&quot;;PMT([.$D$7];[.$D$9];[.$D$3])*-1)">
            <text:p/>
          </table:table-cell>
          <table:table-cell table:style-name="ce433" table:formula="of:=IF([.C85]&gt;[.$D$9];&quot;&quot;;[.$D$7]*[.G84])">
            <text:p/>
          </table:table-cell>
          <table:table-cell table:style-name="ce439" table:formula="of:=IF([.C85]&gt;[.$D$9];&quot;&quot;;[.D85]-[.E85])">
            <text:p/>
          </table:table-cell>
          <table:table-cell table:style-name="ce433" table:formula="of:=IF([.C85]&gt;[.$D$9];&quot;&quot;;[.G84]-[.F8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5]=[.$D$9];[.C85]=&quot;&quot;);&quot;&quot;;IF(ISNUMBER([.C85]);[.C85]+1;1))">
            <text:p/>
          </table:table-cell>
          <table:table-cell table:style-name="ce433" table:formula="of:=IF([.C86]&gt;[.$D$9];&quot;&quot;;PMT([.$D$7];[.$D$9];[.$D$3])*-1)">
            <text:p/>
          </table:table-cell>
          <table:table-cell table:style-name="ce433" table:formula="of:=IF([.C86]&gt;[.$D$9];&quot;&quot;;[.$D$7]*[.G85])">
            <text:p/>
          </table:table-cell>
          <table:table-cell table:style-name="ce439" table:formula="of:=IF([.C86]&gt;[.$D$9];&quot;&quot;;[.D86]-[.E86])">
            <text:p/>
          </table:table-cell>
          <table:table-cell table:style-name="ce433" table:formula="of:=IF([.C86]&gt;[.$D$9];&quot;&quot;;[.G85]-[.F8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6]=[.$D$9];[.C86]=&quot;&quot;);&quot;&quot;;IF(ISNUMBER([.C86]);[.C86]+1;1))">
            <text:p/>
          </table:table-cell>
          <table:table-cell table:style-name="ce433" table:formula="of:=IF([.C87]&gt;[.$D$9];&quot;&quot;;PMT([.$D$7];[.$D$9];[.$D$3])*-1)">
            <text:p/>
          </table:table-cell>
          <table:table-cell table:style-name="ce433" table:formula="of:=IF([.C87]&gt;[.$D$9];&quot;&quot;;[.$D$7]*[.G86])">
            <text:p/>
          </table:table-cell>
          <table:table-cell table:style-name="ce439" table:formula="of:=IF([.C87]&gt;[.$D$9];&quot;&quot;;[.D87]-[.E87])">
            <text:p/>
          </table:table-cell>
          <table:table-cell table:style-name="ce433" table:formula="of:=IF([.C87]&gt;[.$D$9];&quot;&quot;;[.G86]-[.F8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7]=[.$D$9];[.C87]=&quot;&quot;);&quot;&quot;;IF(ISNUMBER([.C87]);[.C87]+1;1))">
            <text:p/>
          </table:table-cell>
          <table:table-cell table:style-name="ce433" table:formula="of:=IF([.C88]&gt;[.$D$9];&quot;&quot;;PMT([.$D$7];[.$D$9];[.$D$3])*-1)">
            <text:p/>
          </table:table-cell>
          <table:table-cell table:style-name="ce433" table:formula="of:=IF([.C88]&gt;[.$D$9];&quot;&quot;;[.$D$7]*[.G87])">
            <text:p/>
          </table:table-cell>
          <table:table-cell table:style-name="ce439" table:formula="of:=IF([.C88]&gt;[.$D$9];&quot;&quot;;[.D88]-[.E88])">
            <text:p/>
          </table:table-cell>
          <table:table-cell table:style-name="ce433" table:formula="of:=IF([.C88]&gt;[.$D$9];&quot;&quot;;[.G87]-[.F8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8]=[.$D$9];[.C88]=&quot;&quot;);&quot;&quot;;IF(ISNUMBER([.C88]);[.C88]+1;1))">
            <text:p/>
          </table:table-cell>
          <table:table-cell table:style-name="ce433" table:formula="of:=IF([.C89]&gt;[.$D$9];&quot;&quot;;PMT([.$D$7];[.$D$9];[.$D$3])*-1)">
            <text:p/>
          </table:table-cell>
          <table:table-cell table:style-name="ce433" table:formula="of:=IF([.C89]&gt;[.$D$9];&quot;&quot;;[.$D$7]*[.G88])">
            <text:p/>
          </table:table-cell>
          <table:table-cell table:style-name="ce439" table:formula="of:=IF([.C89]&gt;[.$D$9];&quot;&quot;;[.D89]-[.E89])">
            <text:p/>
          </table:table-cell>
          <table:table-cell table:style-name="ce433" table:formula="of:=IF([.C89]&gt;[.$D$9];&quot;&quot;;[.G88]-[.F8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89]=[.$D$9];[.C89]=&quot;&quot;);&quot;&quot;;IF(ISNUMBER([.C89]);[.C89]+1;1))">
            <text:p/>
          </table:table-cell>
          <table:table-cell table:style-name="ce433" table:formula="of:=IF([.C90]&gt;[.$D$9];&quot;&quot;;PMT([.$D$7];[.$D$9];[.$D$3])*-1)">
            <text:p/>
          </table:table-cell>
          <table:table-cell table:style-name="ce433" table:formula="of:=IF([.C90]&gt;[.$D$9];&quot;&quot;;[.$D$7]*[.G89])">
            <text:p/>
          </table:table-cell>
          <table:table-cell table:style-name="ce439" table:formula="of:=IF([.C90]&gt;[.$D$9];&quot;&quot;;[.D90]-[.E90])">
            <text:p/>
          </table:table-cell>
          <table:table-cell table:style-name="ce433" table:formula="of:=IF([.C90]&gt;[.$D$9];&quot;&quot;;[.G89]-[.F9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0]=[.$D$9];[.C90]=&quot;&quot;);&quot;&quot;;IF(ISNUMBER([.C90]);[.C90]+1;1))">
            <text:p/>
          </table:table-cell>
          <table:table-cell table:style-name="ce433" table:formula="of:=IF([.C91]&gt;[.$D$9];&quot;&quot;;PMT([.$D$7];[.$D$9];[.$D$3])*-1)">
            <text:p/>
          </table:table-cell>
          <table:table-cell table:style-name="ce433" table:formula="of:=IF([.C91]&gt;[.$D$9];&quot;&quot;;[.$D$7]*[.G90])">
            <text:p/>
          </table:table-cell>
          <table:table-cell table:style-name="ce439" table:formula="of:=IF([.C91]&gt;[.$D$9];&quot;&quot;;[.D91]-[.E91])">
            <text:p/>
          </table:table-cell>
          <table:table-cell table:style-name="ce433" table:formula="of:=IF([.C91]&gt;[.$D$9];&quot;&quot;;[.G90]-[.F9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1]=[.$D$9];[.C91]=&quot;&quot;);&quot;&quot;;IF(ISNUMBER([.C91]);[.C91]+1;1))">
            <text:p/>
          </table:table-cell>
          <table:table-cell table:style-name="ce433" table:formula="of:=IF([.C92]&gt;[.$D$9];&quot;&quot;;PMT([.$D$7];[.$D$9];[.$D$3])*-1)">
            <text:p/>
          </table:table-cell>
          <table:table-cell table:style-name="ce433" table:formula="of:=IF([.C92]&gt;[.$D$9];&quot;&quot;;[.$D$7]*[.G91])">
            <text:p/>
          </table:table-cell>
          <table:table-cell table:style-name="ce439" table:formula="of:=IF([.C92]&gt;[.$D$9];&quot;&quot;;[.D92]-[.E92])">
            <text:p/>
          </table:table-cell>
          <table:table-cell table:style-name="ce433" table:formula="of:=IF([.C92]&gt;[.$D$9];&quot;&quot;;[.G91]-[.F9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2]=[.$D$9];[.C92]=&quot;&quot;);&quot;&quot;;IF(ISNUMBER([.C92]);[.C92]+1;1))">
            <text:p/>
          </table:table-cell>
          <table:table-cell table:style-name="ce433" table:formula="of:=IF([.C93]&gt;[.$D$9];&quot;&quot;;PMT([.$D$7];[.$D$9];[.$D$3])*-1)">
            <text:p/>
          </table:table-cell>
          <table:table-cell table:style-name="ce433" table:formula="of:=IF([.C93]&gt;[.$D$9];&quot;&quot;;[.$D$7]*[.G92])">
            <text:p/>
          </table:table-cell>
          <table:table-cell table:style-name="ce439" table:formula="of:=IF([.C93]&gt;[.$D$9];&quot;&quot;;[.D93]-[.E93])">
            <text:p/>
          </table:table-cell>
          <table:table-cell table:style-name="ce433" table:formula="of:=IF([.C93]&gt;[.$D$9];&quot;&quot;;[.G92]-[.F9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3]=[.$D$9];[.C93]=&quot;&quot;);&quot;&quot;;IF(ISNUMBER([.C93]);[.C93]+1;1))">
            <text:p/>
          </table:table-cell>
          <table:table-cell table:style-name="ce433" table:formula="of:=IF([.C94]&gt;[.$D$9];&quot;&quot;;PMT([.$D$7];[.$D$9];[.$D$3])*-1)">
            <text:p/>
          </table:table-cell>
          <table:table-cell table:style-name="ce433" table:formula="of:=IF([.C94]&gt;[.$D$9];&quot;&quot;;[.$D$7]*[.G93])">
            <text:p/>
          </table:table-cell>
          <table:table-cell table:style-name="ce439" table:formula="of:=IF([.C94]&gt;[.$D$9];&quot;&quot;;[.D94]-[.E94])">
            <text:p/>
          </table:table-cell>
          <table:table-cell table:style-name="ce433" table:formula="of:=IF([.C94]&gt;[.$D$9];&quot;&quot;;[.G93]-[.F9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4]=[.$D$9];[.C94]=&quot;&quot;);&quot;&quot;;IF(ISNUMBER([.C94]);[.C94]+1;1))">
            <text:p/>
          </table:table-cell>
          <table:table-cell table:style-name="ce433" table:formula="of:=IF([.C95]&gt;[.$D$9];&quot;&quot;;PMT([.$D$7];[.$D$9];[.$D$3])*-1)">
            <text:p/>
          </table:table-cell>
          <table:table-cell table:style-name="ce433" table:formula="of:=IF([.C95]&gt;[.$D$9];&quot;&quot;;[.$D$7]*[.G94])">
            <text:p/>
          </table:table-cell>
          <table:table-cell table:style-name="ce439" table:formula="of:=IF([.C95]&gt;[.$D$9];&quot;&quot;;[.D95]-[.E95])">
            <text:p/>
          </table:table-cell>
          <table:table-cell table:style-name="ce433" table:formula="of:=IF([.C95]&gt;[.$D$9];&quot;&quot;;[.G94]-[.F9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5]=[.$D$9];[.C95]=&quot;&quot;);&quot;&quot;;IF(ISNUMBER([.C95]);[.C95]+1;1))">
            <text:p/>
          </table:table-cell>
          <table:table-cell table:style-name="ce433" table:formula="of:=IF([.C96]&gt;[.$D$9];&quot;&quot;;PMT([.$D$7];[.$D$9];[.$D$3])*-1)">
            <text:p/>
          </table:table-cell>
          <table:table-cell table:style-name="ce433" table:formula="of:=IF([.C96]&gt;[.$D$9];&quot;&quot;;[.$D$7]*[.G95])">
            <text:p/>
          </table:table-cell>
          <table:table-cell table:style-name="ce439" table:formula="of:=IF([.C96]&gt;[.$D$9];&quot;&quot;;[.D96]-[.E96])">
            <text:p/>
          </table:table-cell>
          <table:table-cell table:style-name="ce433" table:formula="of:=IF([.C96]&gt;[.$D$9];&quot;&quot;;[.G95]-[.F9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6]=[.$D$9];[.C96]=&quot;&quot;);&quot;&quot;;IF(ISNUMBER([.C96]);[.C96]+1;1))">
            <text:p/>
          </table:table-cell>
          <table:table-cell table:style-name="ce433" table:formula="of:=IF([.C97]&gt;[.$D$9];&quot;&quot;;PMT([.$D$7];[.$D$9];[.$D$3])*-1)">
            <text:p/>
          </table:table-cell>
          <table:table-cell table:style-name="ce433" table:formula="of:=IF([.C97]&gt;[.$D$9];&quot;&quot;;[.$D$7]*[.G96])">
            <text:p/>
          </table:table-cell>
          <table:table-cell table:style-name="ce439" table:formula="of:=IF([.C97]&gt;[.$D$9];&quot;&quot;;[.D97]-[.E97])">
            <text:p/>
          </table:table-cell>
          <table:table-cell table:style-name="ce433" table:formula="of:=IF([.C97]&gt;[.$D$9];&quot;&quot;;[.G96]-[.F9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7]=[.$D$9];[.C97]=&quot;&quot;);&quot;&quot;;IF(ISNUMBER([.C97]);[.C97]+1;1))">
            <text:p/>
          </table:table-cell>
          <table:table-cell table:style-name="ce433" table:formula="of:=IF([.C98]&gt;[.$D$9];&quot;&quot;;PMT([.$D$7];[.$D$9];[.$D$3])*-1)">
            <text:p/>
          </table:table-cell>
          <table:table-cell table:style-name="ce433" table:formula="of:=IF([.C98]&gt;[.$D$9];&quot;&quot;;[.$D$7]*[.G97])">
            <text:p/>
          </table:table-cell>
          <table:table-cell table:style-name="ce439" table:formula="of:=IF([.C98]&gt;[.$D$9];&quot;&quot;;[.D98]-[.E98])">
            <text:p/>
          </table:table-cell>
          <table:table-cell table:style-name="ce433" table:formula="of:=IF([.C98]&gt;[.$D$9];&quot;&quot;;[.G97]-[.F9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8]=[.$D$9];[.C98]=&quot;&quot;);&quot;&quot;;IF(ISNUMBER([.C98]);[.C98]+1;1))">
            <text:p/>
          </table:table-cell>
          <table:table-cell table:style-name="ce433" table:formula="of:=IF([.C99]&gt;[.$D$9];&quot;&quot;;PMT([.$D$7];[.$D$9];[.$D$3])*-1)">
            <text:p/>
          </table:table-cell>
          <table:table-cell table:style-name="ce433" table:formula="of:=IF([.C99]&gt;[.$D$9];&quot;&quot;;[.$D$7]*[.G98])">
            <text:p/>
          </table:table-cell>
          <table:table-cell table:style-name="ce439" table:formula="of:=IF([.C99]&gt;[.$D$9];&quot;&quot;;[.D99]-[.E99])">
            <text:p/>
          </table:table-cell>
          <table:table-cell table:style-name="ce433" table:formula="of:=IF([.C99]&gt;[.$D$9];&quot;&quot;;[.G98]-[.F9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99]=[.$D$9];[.C99]=&quot;&quot;);&quot;&quot;;IF(ISNUMBER([.C99]);[.C99]+1;1))">
            <text:p/>
          </table:table-cell>
          <table:table-cell table:style-name="ce433" table:formula="of:=IF([.C100]&gt;[.$D$9];&quot;&quot;;PMT([.$D$7];[.$D$9];[.$D$3])*-1)">
            <text:p/>
          </table:table-cell>
          <table:table-cell table:style-name="ce433" table:formula="of:=IF([.C100]&gt;[.$D$9];&quot;&quot;;[.$D$7]*[.G99])">
            <text:p/>
          </table:table-cell>
          <table:table-cell table:style-name="ce439" table:formula="of:=IF([.C100]&gt;[.$D$9];&quot;&quot;;[.D100]-[.E100])">
            <text:p/>
          </table:table-cell>
          <table:table-cell table:style-name="ce433" table:formula="of:=IF([.C100]&gt;[.$D$9];&quot;&quot;;[.G99]-[.F10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0]=[.$D$9];[.C100]=&quot;&quot;);&quot;&quot;;IF(ISNUMBER([.C100]);[.C100]+1;1))">
            <text:p/>
          </table:table-cell>
          <table:table-cell table:style-name="ce433" table:formula="of:=IF([.C101]&gt;[.$D$9];&quot;&quot;;PMT([.$D$7];[.$D$9];[.$D$3])*-1)">
            <text:p/>
          </table:table-cell>
          <table:table-cell table:style-name="ce433" table:formula="of:=IF([.C101]&gt;[.$D$9];&quot;&quot;;[.$D$7]*[.G100])">
            <text:p/>
          </table:table-cell>
          <table:table-cell table:style-name="ce439" table:formula="of:=IF([.C101]&gt;[.$D$9];&quot;&quot;;[.D101]-[.E101])">
            <text:p/>
          </table:table-cell>
          <table:table-cell table:style-name="ce433" table:formula="of:=IF([.C101]&gt;[.$D$9];&quot;&quot;;[.G100]-[.F10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1]=[.$D$9];[.C101]=&quot;&quot;);&quot;&quot;;IF(ISNUMBER([.C101]);[.C101]+1;1))">
            <text:p/>
          </table:table-cell>
          <table:table-cell table:style-name="ce433" table:formula="of:=IF([.C102]&gt;[.$D$9];&quot;&quot;;PMT([.$D$7];[.$D$9];[.$D$3])*-1)">
            <text:p/>
          </table:table-cell>
          <table:table-cell table:style-name="ce433" table:formula="of:=IF([.C102]&gt;[.$D$9];&quot;&quot;;[.$D$7]*[.G101])">
            <text:p/>
          </table:table-cell>
          <table:table-cell table:style-name="ce439" table:formula="of:=IF([.C102]&gt;[.$D$9];&quot;&quot;;[.D102]-[.E102])">
            <text:p/>
          </table:table-cell>
          <table:table-cell table:style-name="ce433" table:formula="of:=IF([.C102]&gt;[.$D$9];&quot;&quot;;[.G101]-[.F10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2]=[.$D$9];[.C102]=&quot;&quot;);&quot;&quot;;IF(ISNUMBER([.C102]);[.C102]+1;1))">
            <text:p/>
          </table:table-cell>
          <table:table-cell table:style-name="ce433" table:formula="of:=IF([.C103]&gt;[.$D$9];&quot;&quot;;PMT([.$D$7];[.$D$9];[.$D$3])*-1)">
            <text:p/>
          </table:table-cell>
          <table:table-cell table:style-name="ce433" table:formula="of:=IF([.C103]&gt;[.$D$9];&quot;&quot;;[.$D$7]*[.G102])">
            <text:p/>
          </table:table-cell>
          <table:table-cell table:style-name="ce439" table:formula="of:=IF([.C103]&gt;[.$D$9];&quot;&quot;;[.D103]-[.E103])">
            <text:p/>
          </table:table-cell>
          <table:table-cell table:style-name="ce433" table:formula="of:=IF([.C103]&gt;[.$D$9];&quot;&quot;;[.G102]-[.F10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3]=[.$D$9];[.C103]=&quot;&quot;);&quot;&quot;;IF(ISNUMBER([.C103]);[.C103]+1;1))">
            <text:p/>
          </table:table-cell>
          <table:table-cell table:style-name="ce433" table:formula="of:=IF([.C104]&gt;[.$D$9];&quot;&quot;;PMT([.$D$7];[.$D$9];[.$D$3])*-1)">
            <text:p/>
          </table:table-cell>
          <table:table-cell table:style-name="ce433" table:formula="of:=IF([.C104]&gt;[.$D$9];&quot;&quot;;[.$D$7]*[.G103])">
            <text:p/>
          </table:table-cell>
          <table:table-cell table:style-name="ce439" table:formula="of:=IF([.C104]&gt;[.$D$9];&quot;&quot;;[.D104]-[.E104])">
            <text:p/>
          </table:table-cell>
          <table:table-cell table:style-name="ce433" table:formula="of:=IF([.C104]&gt;[.$D$9];&quot;&quot;;[.G103]-[.F10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4]=[.$D$9];[.C104]=&quot;&quot;);&quot;&quot;;IF(ISNUMBER([.C104]);[.C104]+1;1))">
            <text:p/>
          </table:table-cell>
          <table:table-cell table:style-name="ce433" table:formula="of:=IF([.C105]&gt;[.$D$9];&quot;&quot;;PMT([.$D$7];[.$D$9];[.$D$3])*-1)">
            <text:p/>
          </table:table-cell>
          <table:table-cell table:style-name="ce433" table:formula="of:=IF([.C105]&gt;[.$D$9];&quot;&quot;;[.$D$7]*[.G104])">
            <text:p/>
          </table:table-cell>
          <table:table-cell table:style-name="ce439" table:formula="of:=IF([.C105]&gt;[.$D$9];&quot;&quot;;[.D105]-[.E105])">
            <text:p/>
          </table:table-cell>
          <table:table-cell table:style-name="ce433" table:formula="of:=IF([.C105]&gt;[.$D$9];&quot;&quot;;[.G104]-[.F10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5]=[.$D$9];[.C105]=&quot;&quot;);&quot;&quot;;IF(ISNUMBER([.C105]);[.C105]+1;1))">
            <text:p/>
          </table:table-cell>
          <table:table-cell table:style-name="ce433" table:formula="of:=IF([.C106]&gt;[.$D$9];&quot;&quot;;PMT([.$D$7];[.$D$9];[.$D$3])*-1)">
            <text:p/>
          </table:table-cell>
          <table:table-cell table:style-name="ce433" table:formula="of:=IF([.C106]&gt;[.$D$9];&quot;&quot;;[.$D$7]*[.G105])">
            <text:p/>
          </table:table-cell>
          <table:table-cell table:style-name="ce439" table:formula="of:=IF([.C106]&gt;[.$D$9];&quot;&quot;;[.D106]-[.E106])">
            <text:p/>
          </table:table-cell>
          <table:table-cell table:style-name="ce433" table:formula="of:=IF([.C106]&gt;[.$D$9];&quot;&quot;;[.G105]-[.F10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6]=[.$D$9];[.C106]=&quot;&quot;);&quot;&quot;;IF(ISNUMBER([.C106]);[.C106]+1;1))">
            <text:p/>
          </table:table-cell>
          <table:table-cell table:style-name="ce433" table:formula="of:=IF([.C107]&gt;[.$D$9];&quot;&quot;;PMT([.$D$7];[.$D$9];[.$D$3])*-1)">
            <text:p/>
          </table:table-cell>
          <table:table-cell table:style-name="ce433" table:formula="of:=IF([.C107]&gt;[.$D$9];&quot;&quot;;[.$D$7]*[.G106])">
            <text:p/>
          </table:table-cell>
          <table:table-cell table:style-name="ce439" table:formula="of:=IF([.C107]&gt;[.$D$9];&quot;&quot;;[.D107]-[.E107])">
            <text:p/>
          </table:table-cell>
          <table:table-cell table:style-name="ce433" table:formula="of:=IF([.C107]&gt;[.$D$9];&quot;&quot;;[.G106]-[.F10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7]=[.$D$9];[.C107]=&quot;&quot;);&quot;&quot;;IF(ISNUMBER([.C107]);[.C107]+1;1))">
            <text:p/>
          </table:table-cell>
          <table:table-cell table:style-name="ce433" table:formula="of:=IF([.C108]&gt;[.$D$9];&quot;&quot;;PMT([.$D$7];[.$D$9];[.$D$3])*-1)">
            <text:p/>
          </table:table-cell>
          <table:table-cell table:style-name="ce433" table:formula="of:=IF([.C108]&gt;[.$D$9];&quot;&quot;;[.$D$7]*[.G107])">
            <text:p/>
          </table:table-cell>
          <table:table-cell table:style-name="ce439" table:formula="of:=IF([.C108]&gt;[.$D$9];&quot;&quot;;[.D108]-[.E108])">
            <text:p/>
          </table:table-cell>
          <table:table-cell table:style-name="ce433" table:formula="of:=IF([.C108]&gt;[.$D$9];&quot;&quot;;[.G107]-[.F10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8]=[.$D$9];[.C108]=&quot;&quot;);&quot;&quot;;IF(ISNUMBER([.C108]);[.C108]+1;1))">
            <text:p/>
          </table:table-cell>
          <table:table-cell table:style-name="ce433" table:formula="of:=IF([.C109]&gt;[.$D$9];&quot;&quot;;PMT([.$D$7];[.$D$9];[.$D$3])*-1)">
            <text:p/>
          </table:table-cell>
          <table:table-cell table:style-name="ce433" table:formula="of:=IF([.C109]&gt;[.$D$9];&quot;&quot;;[.$D$7]*[.G108])">
            <text:p/>
          </table:table-cell>
          <table:table-cell table:style-name="ce439" table:formula="of:=IF([.C109]&gt;[.$D$9];&quot;&quot;;[.D109]-[.E109])">
            <text:p/>
          </table:table-cell>
          <table:table-cell table:style-name="ce433" table:formula="of:=IF([.C109]&gt;[.$D$9];&quot;&quot;;[.G108]-[.F10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09]=[.$D$9];[.C109]=&quot;&quot;);&quot;&quot;;IF(ISNUMBER([.C109]);[.C109]+1;1))">
            <text:p/>
          </table:table-cell>
          <table:table-cell table:style-name="ce433" table:formula="of:=IF([.C110]&gt;[.$D$9];&quot;&quot;;PMT([.$D$7];[.$D$9];[.$D$3])*-1)">
            <text:p/>
          </table:table-cell>
          <table:table-cell table:style-name="ce433" table:formula="of:=IF([.C110]&gt;[.$D$9];&quot;&quot;;[.$D$7]*[.G109])">
            <text:p/>
          </table:table-cell>
          <table:table-cell table:style-name="ce439" table:formula="of:=IF([.C110]&gt;[.$D$9];&quot;&quot;;[.D110]-[.E110])">
            <text:p/>
          </table:table-cell>
          <table:table-cell table:style-name="ce433" table:formula="of:=IF([.C110]&gt;[.$D$9];&quot;&quot;;[.G109]-[.F11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0]=[.$D$9];[.C110]=&quot;&quot;);&quot;&quot;;IF(ISNUMBER([.C110]);[.C110]+1;1))">
            <text:p/>
          </table:table-cell>
          <table:table-cell table:style-name="ce433" table:formula="of:=IF([.C111]&gt;[.$D$9];&quot;&quot;;PMT([.$D$7];[.$D$9];[.$D$3])*-1)">
            <text:p/>
          </table:table-cell>
          <table:table-cell table:style-name="ce433" table:formula="of:=IF([.C111]&gt;[.$D$9];&quot;&quot;;[.$D$7]*[.G110])">
            <text:p/>
          </table:table-cell>
          <table:table-cell table:style-name="ce439" table:formula="of:=IF([.C111]&gt;[.$D$9];&quot;&quot;;[.D111]-[.E111])">
            <text:p/>
          </table:table-cell>
          <table:table-cell table:style-name="ce433" table:formula="of:=IF([.C111]&gt;[.$D$9];&quot;&quot;;[.G110]-[.F11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1]=[.$D$9];[.C111]=&quot;&quot;);&quot;&quot;;IF(ISNUMBER([.C111]);[.C111]+1;1))">
            <text:p/>
          </table:table-cell>
          <table:table-cell table:style-name="ce433" table:formula="of:=IF([.C112]&gt;[.$D$9];&quot;&quot;;PMT([.$D$7];[.$D$9];[.$D$3])*-1)">
            <text:p/>
          </table:table-cell>
          <table:table-cell table:style-name="ce433" table:formula="of:=IF([.C112]&gt;[.$D$9];&quot;&quot;;[.$D$7]*[.G111])">
            <text:p/>
          </table:table-cell>
          <table:table-cell table:style-name="ce439" table:formula="of:=IF([.C112]&gt;[.$D$9];&quot;&quot;;[.D112]-[.E112])">
            <text:p/>
          </table:table-cell>
          <table:table-cell table:style-name="ce433" table:formula="of:=IF([.C112]&gt;[.$D$9];&quot;&quot;;[.G111]-[.F11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2]=[.$D$9];[.C112]=&quot;&quot;);&quot;&quot;;IF(ISNUMBER([.C112]);[.C112]+1;1))">
            <text:p/>
          </table:table-cell>
          <table:table-cell table:style-name="ce433" table:formula="of:=IF([.C113]&gt;[.$D$9];&quot;&quot;;PMT([.$D$7];[.$D$9];[.$D$3])*-1)">
            <text:p/>
          </table:table-cell>
          <table:table-cell table:style-name="ce433" table:formula="of:=IF([.C113]&gt;[.$D$9];&quot;&quot;;[.$D$7]*[.G112])">
            <text:p/>
          </table:table-cell>
          <table:table-cell table:style-name="ce439" table:formula="of:=IF([.C113]&gt;[.$D$9];&quot;&quot;;[.D113]-[.E113])">
            <text:p/>
          </table:table-cell>
          <table:table-cell table:style-name="ce433" table:formula="of:=IF([.C113]&gt;[.$D$9];&quot;&quot;;[.G112]-[.F11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3]=[.$D$9];[.C113]=&quot;&quot;);&quot;&quot;;IF(ISNUMBER([.C113]);[.C113]+1;1))">
            <text:p/>
          </table:table-cell>
          <table:table-cell table:style-name="ce433" table:formula="of:=IF([.C114]&gt;[.$D$9];&quot;&quot;;PMT([.$D$7];[.$D$9];[.$D$3])*-1)">
            <text:p/>
          </table:table-cell>
          <table:table-cell table:style-name="ce433" table:formula="of:=IF([.C114]&gt;[.$D$9];&quot;&quot;;[.$D$7]*[.G113])">
            <text:p/>
          </table:table-cell>
          <table:table-cell table:style-name="ce439" table:formula="of:=IF([.C114]&gt;[.$D$9];&quot;&quot;;[.D114]-[.E114])">
            <text:p/>
          </table:table-cell>
          <table:table-cell table:style-name="ce433" table:formula="of:=IF([.C114]&gt;[.$D$9];&quot;&quot;;[.G113]-[.F11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4]=[.$D$9];[.C114]=&quot;&quot;);&quot;&quot;;IF(ISNUMBER([.C114]);[.C114]+1;1))">
            <text:p/>
          </table:table-cell>
          <table:table-cell table:style-name="ce433" table:formula="of:=IF([.C115]&gt;[.$D$9];&quot;&quot;;PMT([.$D$7];[.$D$9];[.$D$3])*-1)">
            <text:p/>
          </table:table-cell>
          <table:table-cell table:style-name="ce433" table:formula="of:=IF([.C115]&gt;[.$D$9];&quot;&quot;;[.$D$7]*[.G114])">
            <text:p/>
          </table:table-cell>
          <table:table-cell table:style-name="ce439" table:formula="of:=IF([.C115]&gt;[.$D$9];&quot;&quot;;[.D115]-[.E115])">
            <text:p/>
          </table:table-cell>
          <table:table-cell table:style-name="ce433" table:formula="of:=IF([.C115]&gt;[.$D$9];&quot;&quot;;[.G114]-[.F11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5]=[.$D$9];[.C115]=&quot;&quot;);&quot;&quot;;IF(ISNUMBER([.C115]);[.C115]+1;1))">
            <text:p/>
          </table:table-cell>
          <table:table-cell table:style-name="ce433" table:formula="of:=IF([.C116]&gt;[.$D$9];&quot;&quot;;PMT([.$D$7];[.$D$9];[.$D$3])*-1)">
            <text:p/>
          </table:table-cell>
          <table:table-cell table:style-name="ce433" table:formula="of:=IF([.C116]&gt;[.$D$9];&quot;&quot;;[.$D$7]*[.G115])">
            <text:p/>
          </table:table-cell>
          <table:table-cell table:style-name="ce439" table:formula="of:=IF([.C116]&gt;[.$D$9];&quot;&quot;;[.D116]-[.E116])">
            <text:p/>
          </table:table-cell>
          <table:table-cell table:style-name="ce433" table:formula="of:=IF([.C116]&gt;[.$D$9];&quot;&quot;;[.G115]-[.F11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6]=[.$D$9];[.C116]=&quot;&quot;);&quot;&quot;;IF(ISNUMBER([.C116]);[.C116]+1;1))">
            <text:p/>
          </table:table-cell>
          <table:table-cell table:style-name="ce433" table:formula="of:=IF([.C117]&gt;[.$D$9];&quot;&quot;;PMT([.$D$7];[.$D$9];[.$D$3])*-1)">
            <text:p/>
          </table:table-cell>
          <table:table-cell table:style-name="ce433" table:formula="of:=IF([.C117]&gt;[.$D$9];&quot;&quot;;[.$D$7]*[.G116])">
            <text:p/>
          </table:table-cell>
          <table:table-cell table:style-name="ce439" table:formula="of:=IF([.C117]&gt;[.$D$9];&quot;&quot;;[.D117]-[.E117])">
            <text:p/>
          </table:table-cell>
          <table:table-cell table:style-name="ce433" table:formula="of:=IF([.C117]&gt;[.$D$9];&quot;&quot;;[.G116]-[.F11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7]=[.$D$9];[.C117]=&quot;&quot;);&quot;&quot;;IF(ISNUMBER([.C117]);[.C117]+1;1))">
            <text:p/>
          </table:table-cell>
          <table:table-cell table:style-name="ce433" table:formula="of:=IF([.C118]&gt;[.$D$9];&quot;&quot;;PMT([.$D$7];[.$D$9];[.$D$3])*-1)">
            <text:p/>
          </table:table-cell>
          <table:table-cell table:style-name="ce433" table:formula="of:=IF([.C118]&gt;[.$D$9];&quot;&quot;;[.$D$7]*[.G117])">
            <text:p/>
          </table:table-cell>
          <table:table-cell table:style-name="ce439" table:formula="of:=IF([.C118]&gt;[.$D$9];&quot;&quot;;[.D118]-[.E118])">
            <text:p/>
          </table:table-cell>
          <table:table-cell table:style-name="ce433" table:formula="of:=IF([.C118]&gt;[.$D$9];&quot;&quot;;[.G117]-[.F11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8]=[.$D$9];[.C118]=&quot;&quot;);&quot;&quot;;IF(ISNUMBER([.C118]);[.C118]+1;1))">
            <text:p/>
          </table:table-cell>
          <table:table-cell table:style-name="ce433" table:formula="of:=IF([.C119]&gt;[.$D$9];&quot;&quot;;PMT([.$D$7];[.$D$9];[.$D$3])*-1)">
            <text:p/>
          </table:table-cell>
          <table:table-cell table:style-name="ce433" table:formula="of:=IF([.C119]&gt;[.$D$9];&quot;&quot;;[.$D$7]*[.G118])">
            <text:p/>
          </table:table-cell>
          <table:table-cell table:style-name="ce439" table:formula="of:=IF([.C119]&gt;[.$D$9];&quot;&quot;;[.D119]-[.E119])">
            <text:p/>
          </table:table-cell>
          <table:table-cell table:style-name="ce433" table:formula="of:=IF([.C119]&gt;[.$D$9];&quot;&quot;;[.G118]-[.F11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19]=[.$D$9];[.C119]=&quot;&quot;);&quot;&quot;;IF(ISNUMBER([.C119]);[.C119]+1;1))">
            <text:p/>
          </table:table-cell>
          <table:table-cell table:style-name="ce433" table:formula="of:=IF([.C120]&gt;[.$D$9];&quot;&quot;;PMT([.$D$7];[.$D$9];[.$D$3])*-1)">
            <text:p/>
          </table:table-cell>
          <table:table-cell table:style-name="ce433" table:formula="of:=IF([.C120]&gt;[.$D$9];&quot;&quot;;[.$D$7]*[.G119])">
            <text:p/>
          </table:table-cell>
          <table:table-cell table:style-name="ce439" table:formula="of:=IF([.C120]&gt;[.$D$9];&quot;&quot;;[.D120]-[.E120])">
            <text:p/>
          </table:table-cell>
          <table:table-cell table:style-name="ce433" table:formula="of:=IF([.C120]&gt;[.$D$9];&quot;&quot;;[.G119]-[.F12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0]=[.$D$9];[.C120]=&quot;&quot;);&quot;&quot;;IF(ISNUMBER([.C120]);[.C120]+1;1))">
            <text:p/>
          </table:table-cell>
          <table:table-cell table:style-name="ce433" table:formula="of:=IF([.C121]&gt;[.$D$9];&quot;&quot;;PMT([.$D$7];[.$D$9];[.$D$3])*-1)">
            <text:p/>
          </table:table-cell>
          <table:table-cell table:style-name="ce433" table:formula="of:=IF([.C121]&gt;[.$D$9];&quot;&quot;;[.$D$7]*[.G120])">
            <text:p/>
          </table:table-cell>
          <table:table-cell table:style-name="ce439" table:formula="of:=IF([.C121]&gt;[.$D$9];&quot;&quot;;[.D121]-[.E121])">
            <text:p/>
          </table:table-cell>
          <table:table-cell table:style-name="ce433" table:formula="of:=IF([.C121]&gt;[.$D$9];&quot;&quot;;[.G120]-[.F12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1]=[.$D$9];[.C121]=&quot;&quot;);&quot;&quot;;IF(ISNUMBER([.C121]);[.C121]+1;1))">
            <text:p/>
          </table:table-cell>
          <table:table-cell table:style-name="ce433" table:formula="of:=IF([.C122]&gt;[.$D$9];&quot;&quot;;PMT([.$D$7];[.$D$9];[.$D$3])*-1)">
            <text:p/>
          </table:table-cell>
          <table:table-cell table:style-name="ce433" table:formula="of:=IF([.C122]&gt;[.$D$9];&quot;&quot;;[.$D$7]*[.G121])">
            <text:p/>
          </table:table-cell>
          <table:table-cell table:style-name="ce439" table:formula="of:=IF([.C122]&gt;[.$D$9];&quot;&quot;;[.D122]-[.E122])">
            <text:p/>
          </table:table-cell>
          <table:table-cell table:style-name="ce433" table:formula="of:=IF([.C122]&gt;[.$D$9];&quot;&quot;;[.G121]-[.F12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2]=[.$D$9];[.C122]=&quot;&quot;);&quot;&quot;;IF(ISNUMBER([.C122]);[.C122]+1;1))">
            <text:p/>
          </table:table-cell>
          <table:table-cell table:style-name="ce433" table:formula="of:=IF([.C123]&gt;[.$D$9];&quot;&quot;;PMT([.$D$7];[.$D$9];[.$D$3])*-1)">
            <text:p/>
          </table:table-cell>
          <table:table-cell table:style-name="ce433" table:formula="of:=IF([.C123]&gt;[.$D$9];&quot;&quot;;[.$D$7]*[.G122])">
            <text:p/>
          </table:table-cell>
          <table:table-cell table:style-name="ce439" table:formula="of:=IF([.C123]&gt;[.$D$9];&quot;&quot;;[.D123]-[.E123])">
            <text:p/>
          </table:table-cell>
          <table:table-cell table:style-name="ce433" table:formula="of:=IF([.C123]&gt;[.$D$9];&quot;&quot;;[.G122]-[.F12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3]=[.$D$9];[.C123]=&quot;&quot;);&quot;&quot;;IF(ISNUMBER([.C123]);[.C123]+1;1))">
            <text:p/>
          </table:table-cell>
          <table:table-cell table:style-name="ce433" table:formula="of:=IF([.C124]&gt;[.$D$9];&quot;&quot;;PMT([.$D$7];[.$D$9];[.$D$3])*-1)">
            <text:p/>
          </table:table-cell>
          <table:table-cell table:style-name="ce433" table:formula="of:=IF([.C124]&gt;[.$D$9];&quot;&quot;;[.$D$7]*[.G123])">
            <text:p/>
          </table:table-cell>
          <table:table-cell table:style-name="ce439" table:formula="of:=IF([.C124]&gt;[.$D$9];&quot;&quot;;[.D124]-[.E124])">
            <text:p/>
          </table:table-cell>
          <table:table-cell table:style-name="ce433" table:formula="of:=IF([.C124]&gt;[.$D$9];&quot;&quot;;[.G123]-[.F12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4]=[.$D$9];[.C124]=&quot;&quot;);&quot;&quot;;IF(ISNUMBER([.C124]);[.C124]+1;1))">
            <text:p/>
          </table:table-cell>
          <table:table-cell table:style-name="ce433" table:formula="of:=IF([.C125]&gt;[.$D$9];&quot;&quot;;PMT([.$D$7];[.$D$9];[.$D$3])*-1)">
            <text:p/>
          </table:table-cell>
          <table:table-cell table:style-name="ce433" table:formula="of:=IF([.C125]&gt;[.$D$9];&quot;&quot;;[.$D$7]*[.G124])">
            <text:p/>
          </table:table-cell>
          <table:table-cell table:style-name="ce439" table:formula="of:=IF([.C125]&gt;[.$D$9];&quot;&quot;;[.D125]-[.E125])">
            <text:p/>
          </table:table-cell>
          <table:table-cell table:style-name="ce433" table:formula="of:=IF([.C125]&gt;[.$D$9];&quot;&quot;;[.G124]-[.F12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5]=[.$D$9];[.C125]=&quot;&quot;);&quot;&quot;;IF(ISNUMBER([.C125]);[.C125]+1;1))">
            <text:p/>
          </table:table-cell>
          <table:table-cell table:style-name="ce433" table:formula="of:=IF([.C126]&gt;[.$D$9];&quot;&quot;;PMT([.$D$7];[.$D$9];[.$D$3])*-1)">
            <text:p/>
          </table:table-cell>
          <table:table-cell table:style-name="ce433" table:formula="of:=IF([.C126]&gt;[.$D$9];&quot;&quot;;[.$D$7]*[.G125])">
            <text:p/>
          </table:table-cell>
          <table:table-cell table:style-name="ce439" table:formula="of:=IF([.C126]&gt;[.$D$9];&quot;&quot;;[.D126]-[.E126])">
            <text:p/>
          </table:table-cell>
          <table:table-cell table:style-name="ce433" table:formula="of:=IF([.C126]&gt;[.$D$9];&quot;&quot;;[.G125]-[.F12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6]=[.$D$9];[.C126]=&quot;&quot;);&quot;&quot;;IF(ISNUMBER([.C126]);[.C126]+1;1))">
            <text:p/>
          </table:table-cell>
          <table:table-cell table:style-name="ce433" table:formula="of:=IF([.C127]&gt;[.$D$9];&quot;&quot;;PMT([.$D$7];[.$D$9];[.$D$3])*-1)">
            <text:p/>
          </table:table-cell>
          <table:table-cell table:style-name="ce433" table:formula="of:=IF([.C127]&gt;[.$D$9];&quot;&quot;;[.$D$7]*[.G126])">
            <text:p/>
          </table:table-cell>
          <table:table-cell table:style-name="ce439" table:formula="of:=IF([.C127]&gt;[.$D$9];&quot;&quot;;[.D127]-[.E127])">
            <text:p/>
          </table:table-cell>
          <table:table-cell table:style-name="ce433" table:formula="of:=IF([.C127]&gt;[.$D$9];&quot;&quot;;[.G126]-[.F12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7]=[.$D$9];[.C127]=&quot;&quot;);&quot;&quot;;IF(ISNUMBER([.C127]);[.C127]+1;1))">
            <text:p/>
          </table:table-cell>
          <table:table-cell table:style-name="ce433" table:formula="of:=IF([.C128]&gt;[.$D$9];&quot;&quot;;PMT([.$D$7];[.$D$9];[.$D$3])*-1)">
            <text:p/>
          </table:table-cell>
          <table:table-cell table:style-name="ce433" table:formula="of:=IF([.C128]&gt;[.$D$9];&quot;&quot;;[.$D$7]*[.G127])">
            <text:p/>
          </table:table-cell>
          <table:table-cell table:style-name="ce439" table:formula="of:=IF([.C128]&gt;[.$D$9];&quot;&quot;;[.D128]-[.E128])">
            <text:p/>
          </table:table-cell>
          <table:table-cell table:style-name="ce433" table:formula="of:=IF([.C128]&gt;[.$D$9];&quot;&quot;;[.G127]-[.F12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8]=[.$D$9];[.C128]=&quot;&quot;);&quot;&quot;;IF(ISNUMBER([.C128]);[.C128]+1;1))">
            <text:p/>
          </table:table-cell>
          <table:table-cell table:style-name="ce433" table:formula="of:=IF([.C129]&gt;[.$D$9];&quot;&quot;;PMT([.$D$7];[.$D$9];[.$D$3])*-1)">
            <text:p/>
          </table:table-cell>
          <table:table-cell table:style-name="ce433" table:formula="of:=IF([.C129]&gt;[.$D$9];&quot;&quot;;[.$D$7]*[.G128])">
            <text:p/>
          </table:table-cell>
          <table:table-cell table:style-name="ce439" table:formula="of:=IF([.C129]&gt;[.$D$9];&quot;&quot;;[.D129]-[.E129])">
            <text:p/>
          </table:table-cell>
          <table:table-cell table:style-name="ce433" table:formula="of:=IF([.C129]&gt;[.$D$9];&quot;&quot;;[.G128]-[.F12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29]=[.$D$9];[.C129]=&quot;&quot;);&quot;&quot;;IF(ISNUMBER([.C129]);[.C129]+1;1))">
            <text:p/>
          </table:table-cell>
          <table:table-cell table:style-name="ce433" table:formula="of:=IF([.C130]&gt;[.$D$9];&quot;&quot;;PMT([.$D$7];[.$D$9];[.$D$3])*-1)">
            <text:p/>
          </table:table-cell>
          <table:table-cell table:style-name="ce433" table:formula="of:=IF([.C130]&gt;[.$D$9];&quot;&quot;;[.$D$7]*[.G129])">
            <text:p/>
          </table:table-cell>
          <table:table-cell table:style-name="ce439" table:formula="of:=IF([.C130]&gt;[.$D$9];&quot;&quot;;[.D130]-[.E130])">
            <text:p/>
          </table:table-cell>
          <table:table-cell table:style-name="ce433" table:formula="of:=IF([.C130]&gt;[.$D$9];&quot;&quot;;[.G129]-[.F13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30]=[.$D$9];[.C130]=&quot;&quot;);&quot;&quot;;IF(ISNUMBER([.C130]);[.C130]+1;1))">
            <text:p/>
          </table:table-cell>
          <table:table-cell table:style-name="ce433" table:formula="of:=IF([.C131]&gt;[.$D$9];&quot;&quot;;PMT([.$D$7];[.$D$9];[.$D$3])*-1)">
            <text:p/>
          </table:table-cell>
          <table:table-cell table:style-name="ce433" table:formula="of:=IF([.C131]&gt;[.$D$9];&quot;&quot;;[.$D$7]*[.G130])">
            <text:p/>
          </table:table-cell>
          <table:table-cell table:style-name="ce439" table:formula="of:=IF([.C131]&gt;[.$D$9];&quot;&quot;;[.D131]-[.E131])">
            <text:p/>
          </table:table-cell>
          <table:table-cell table:style-name="ce433" table:formula="of:=IF([.C131]&gt;[.$D$9];&quot;&quot;;[.G130]-[.F13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31]=[.$D$9];[.C131]=&quot;&quot;);&quot;&quot;;IF(ISNUMBER([.C131]);[.C131]+1;1))">
            <text:p/>
          </table:table-cell>
          <table:table-cell table:style-name="ce433" table:formula="of:=IF([.C132]&gt;[.$D$9];&quot;&quot;;PMT([.$D$7];[.$D$9];[.$D$3])*-1)">
            <text:p/>
          </table:table-cell>
          <table:table-cell table:style-name="ce433" table:formula="of:=IF([.C132]&gt;[.$D$9];&quot;&quot;;[.$D$7]*[.G131])">
            <text:p/>
          </table:table-cell>
          <table:table-cell table:style-name="ce439" table:formula="of:=IF([.C132]&gt;[.$D$9];&quot;&quot;;[.D132]-[.E132])">
            <text:p/>
          </table:table-cell>
          <table:table-cell table:style-name="ce433" table:formula="of:=IF([.C132]&gt;[.$D$9];&quot;&quot;;[.G131]-[.F13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2]=[.$D$9];[.C132]=&quot;&quot;);&quot;&quot;;IF(ISNUMBER([.C132]);[.C132]+1;1))">
            <text:p/>
          </table:table-cell>
          <table:table-cell table:style-name="ce433" table:formula="of:=IF([.C133]&gt;[.$D$9];&quot;&quot;;PMT([.$D$7];[.$D$9];[.$D$3])*-1)">
            <text:p/>
          </table:table-cell>
          <table:table-cell table:style-name="ce433" table:formula="of:=IF([.C133]&gt;[.$D$9];&quot;&quot;;[.$D$7]*[.G132])">
            <text:p/>
          </table:table-cell>
          <table:table-cell table:style-name="ce439" table:formula="of:=IF([.C133]&gt;[.$D$9];&quot;&quot;;[.D133]-[.E133])">
            <text:p/>
          </table:table-cell>
          <table:table-cell table:style-name="ce433" table:formula="of:=IF([.C133]&gt;[.$D$9];&quot;&quot;;[.G132]-[.F13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3]=[.$D$9];[.C133]=&quot;&quot;);&quot;&quot;;IF(ISNUMBER([.C133]);[.C133]+1;1))">
            <text:p/>
          </table:table-cell>
          <table:table-cell table:style-name="ce433" table:formula="of:=IF([.C134]&gt;[.$D$9];&quot;&quot;;PMT([.$D$7];[.$D$9];[.$D$3])*-1)">
            <text:p/>
          </table:table-cell>
          <table:table-cell table:style-name="ce433" table:formula="of:=IF([.C134]&gt;[.$D$9];&quot;&quot;;[.$D$7]*[.G133])">
            <text:p/>
          </table:table-cell>
          <table:table-cell table:style-name="ce439" table:formula="of:=IF([.C134]&gt;[.$D$9];&quot;&quot;;[.D134]-[.E134])">
            <text:p/>
          </table:table-cell>
          <table:table-cell table:style-name="ce433" table:formula="of:=IF([.C134]&gt;[.$D$9];&quot;&quot;;[.G133]-[.F13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4]=[.$D$9];[.C134]=&quot;&quot;);&quot;&quot;;IF(ISNUMBER([.C134]);[.C134]+1;1))">
            <text:p/>
          </table:table-cell>
          <table:table-cell table:style-name="ce433" table:formula="of:=IF([.C135]&gt;[.$D$9];&quot;&quot;;PMT([.$D$7];[.$D$9];[.$D$3])*-1)">
            <text:p/>
          </table:table-cell>
          <table:table-cell table:style-name="ce433" table:formula="of:=IF([.C135]&gt;[.$D$9];&quot;&quot;;[.$D$7]*[.G134])">
            <text:p/>
          </table:table-cell>
          <table:table-cell table:style-name="ce439" table:formula="of:=IF([.C135]&gt;[.$D$9];&quot;&quot;;[.D135]-[.E135])">
            <text:p/>
          </table:table-cell>
          <table:table-cell table:style-name="ce433" table:formula="of:=IF([.C135]&gt;[.$D$9];&quot;&quot;;[.G134]-[.F13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5]=[.$D$9];[.C135]=&quot;&quot;);&quot;&quot;;IF(ISNUMBER([.C135]);[.C135]+1;1))">
            <text:p/>
          </table:table-cell>
          <table:table-cell table:style-name="ce433" table:formula="of:=IF([.C136]&gt;[.$D$9];&quot;&quot;;PMT([.$D$7];[.$D$9];[.$D$3])*-1)">
            <text:p/>
          </table:table-cell>
          <table:table-cell table:style-name="ce433" table:formula="of:=IF([.C136]&gt;[.$D$9];&quot;&quot;;[.$D$7]*[.G135])">
            <text:p/>
          </table:table-cell>
          <table:table-cell table:style-name="ce439" table:formula="of:=IF([.C136]&gt;[.$D$9];&quot;&quot;;[.D136]-[.E136])">
            <text:p/>
          </table:table-cell>
          <table:table-cell table:style-name="ce433" table:formula="of:=IF([.C136]&gt;[.$D$9];&quot;&quot;;[.G135]-[.F13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6]=[.$D$9];[.C136]=&quot;&quot;);&quot;&quot;;IF(ISNUMBER([.C136]);[.C136]+1;1))">
            <text:p/>
          </table:table-cell>
          <table:table-cell table:style-name="ce433" table:formula="of:=IF([.C137]&gt;[.$D$9];&quot;&quot;;PMT([.$D$7];[.$D$9];[.$D$3])*-1)">
            <text:p/>
          </table:table-cell>
          <table:table-cell table:style-name="ce433" table:formula="of:=IF([.C137]&gt;[.$D$9];&quot;&quot;;[.$D$7]*[.G136])">
            <text:p/>
          </table:table-cell>
          <table:table-cell table:style-name="ce439" table:formula="of:=IF([.C137]&gt;[.$D$9];&quot;&quot;;[.D137]-[.E137])">
            <text:p/>
          </table:table-cell>
          <table:table-cell table:style-name="ce433" table:formula="of:=IF([.C137]&gt;[.$D$9];&quot;&quot;;[.G136]-[.F13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7]=[.$D$9];[.C137]=&quot;&quot;);&quot;&quot;;IF(ISNUMBER([.C137]);[.C137]+1;1))">
            <text:p/>
          </table:table-cell>
          <table:table-cell table:style-name="ce433" table:formula="of:=IF([.C138]&gt;[.$D$9];&quot;&quot;;PMT([.$D$7];[.$D$9];[.$D$3])*-1)">
            <text:p/>
          </table:table-cell>
          <table:table-cell table:style-name="ce433" table:formula="of:=IF([.C138]&gt;[.$D$9];&quot;&quot;;[.$D$7]*[.G137])">
            <text:p/>
          </table:table-cell>
          <table:table-cell table:style-name="ce439" table:formula="of:=IF([.C138]&gt;[.$D$9];&quot;&quot;;[.D138]-[.E138])">
            <text:p/>
          </table:table-cell>
          <table:table-cell table:style-name="ce433" table:formula="of:=IF([.C138]&gt;[.$D$9];&quot;&quot;;[.G137]-[.F13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8]=[.$D$9];[.C138]=&quot;&quot;);&quot;&quot;;IF(ISNUMBER([.C138]);[.C138]+1;1))">
            <text:p/>
          </table:table-cell>
          <table:table-cell table:style-name="ce433" table:formula="of:=IF([.C139]&gt;[.$D$9];&quot;&quot;;PMT([.$D$7];[.$D$9];[.$D$3])*-1)">
            <text:p/>
          </table:table-cell>
          <table:table-cell table:style-name="ce433" table:formula="of:=IF([.C139]&gt;[.$D$9];&quot;&quot;;[.$D$7]*[.G138])">
            <text:p/>
          </table:table-cell>
          <table:table-cell table:style-name="ce439" table:formula="of:=IF([.C139]&gt;[.$D$9];&quot;&quot;;[.D139]-[.E139])">
            <text:p/>
          </table:table-cell>
          <table:table-cell table:style-name="ce433" table:formula="of:=IF([.C139]&gt;[.$D$9];&quot;&quot;;[.G138]-[.F13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39]=[.$D$9];[.C139]=&quot;&quot;);&quot;&quot;;IF(ISNUMBER([.C139]);[.C139]+1;1))">
            <text:p/>
          </table:table-cell>
          <table:table-cell table:style-name="ce433" table:formula="of:=IF([.C140]&gt;[.$D$9];&quot;&quot;;PMT([.$D$7];[.$D$9];[.$D$3])*-1)">
            <text:p/>
          </table:table-cell>
          <table:table-cell table:style-name="ce433" table:formula="of:=IF([.C140]&gt;[.$D$9];&quot;&quot;;[.$D$7]*[.G139])">
            <text:p/>
          </table:table-cell>
          <table:table-cell table:style-name="ce439" table:formula="of:=IF([.C140]&gt;[.$D$9];&quot;&quot;;[.D140]-[.E140])">
            <text:p/>
          </table:table-cell>
          <table:table-cell table:style-name="ce433" table:formula="of:=IF([.C140]&gt;[.$D$9];&quot;&quot;;[.G139]-[.F14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4" table:formula="of:=IF(OR([.C140]=[.$D$9];[.C140]=&quot;&quot;);&quot;&quot;;IF(ISNUMBER([.C140]);[.C140]+1;1))">
            <text:p/>
          </table:table-cell>
          <table:table-cell table:style-name="ce433" table:formula="of:=IF([.C141]&gt;[.$D$9];&quot;&quot;;PMT([.$D$7];[.$D$9];[.$D$3])*-1)">
            <text:p/>
          </table:table-cell>
          <table:table-cell table:style-name="ce433" table:formula="of:=IF([.C141]&gt;[.$D$9];&quot;&quot;;[.$D$7]*[.G140])">
            <text:p/>
          </table:table-cell>
          <table:table-cell table:style-name="ce439" table:formula="of:=IF([.C141]&gt;[.$D$9];&quot;&quot;;[.D141]-[.E141])">
            <text:p/>
          </table:table-cell>
          <table:table-cell table:style-name="ce433" table:formula="of:=IF([.C141]&gt;[.$D$9];&quot;&quot;;[.G140]-[.F14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1]=[.$D$9];[.C141]=&quot;&quot;);&quot;&quot;;IF(ISNUMBER([.C141]);[.C141]+1;1))">
            <text:p/>
          </table:table-cell>
          <table:table-cell table:style-name="ce433" table:formula="of:=IF([.C142]&gt;[.$D$9];&quot;&quot;;PMT([.$D$7];[.$D$9];[.$D$3])*-1)">
            <text:p/>
          </table:table-cell>
          <table:table-cell table:style-name="ce433" table:formula="of:=IF([.C142]&gt;[.$D$9];&quot;&quot;;[.$D$7]*[.G141])">
            <text:p/>
          </table:table-cell>
          <table:table-cell table:style-name="ce439" table:formula="of:=IF([.C142]&gt;[.$D$9];&quot;&quot;;[.D142]-[.E142])">
            <text:p/>
          </table:table-cell>
          <table:table-cell table:style-name="ce433" table:formula="of:=IF([.C142]&gt;[.$D$9];&quot;&quot;;[.G141]-[.F14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2]=[.$D$9];[.C142]=&quot;&quot;);&quot;&quot;;IF(ISNUMBER([.C142]);[.C142]+1;1))">
            <text:p/>
          </table:table-cell>
          <table:table-cell table:style-name="ce433" table:formula="of:=IF([.C143]&gt;[.$D$9];&quot;&quot;;PMT([.$D$7];[.$D$9];[.$D$3])*-1)">
            <text:p/>
          </table:table-cell>
          <table:table-cell table:style-name="ce433" table:formula="of:=IF([.C143]&gt;[.$D$9];&quot;&quot;;[.$D$7]*[.G142])">
            <text:p/>
          </table:table-cell>
          <table:table-cell table:style-name="ce439" table:formula="of:=IF([.C143]&gt;[.$D$9];&quot;&quot;;[.D143]-[.E143])">
            <text:p/>
          </table:table-cell>
          <table:table-cell table:style-name="ce433" table:formula="of:=IF([.C143]&gt;[.$D$9];&quot;&quot;;[.G142]-[.F14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3]=[.$D$9];[.C143]=&quot;&quot;);&quot;&quot;;IF(ISNUMBER([.C143]);[.C143]+1;1))">
            <text:p/>
          </table:table-cell>
          <table:table-cell table:style-name="ce433" table:formula="of:=IF([.C144]&gt;[.$D$9];&quot;&quot;;PMT([.$D$7];[.$D$9];[.$D$3])*-1)">
            <text:p/>
          </table:table-cell>
          <table:table-cell table:style-name="ce433" table:formula="of:=IF([.C144]&gt;[.$D$9];&quot;&quot;;[.$D$7]*[.G143])">
            <text:p/>
          </table:table-cell>
          <table:table-cell table:style-name="ce439" table:formula="of:=IF([.C144]&gt;[.$D$9];&quot;&quot;;[.D144]-[.E144])">
            <text:p/>
          </table:table-cell>
          <table:table-cell table:style-name="ce433" table:formula="of:=IF([.C144]&gt;[.$D$9];&quot;&quot;;[.G143]-[.F14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4]=[.$D$9];[.C144]=&quot;&quot;);&quot;&quot;;IF(ISNUMBER([.C144]);[.C144]+1;1))">
            <text:p/>
          </table:table-cell>
          <table:table-cell table:style-name="ce433" table:formula="of:=IF([.C145]&gt;[.$D$9];&quot;&quot;;PMT([.$D$7];[.$D$9];[.$D$3])*-1)">
            <text:p/>
          </table:table-cell>
          <table:table-cell table:style-name="ce433" table:formula="of:=IF([.C145]&gt;[.$D$9];&quot;&quot;;[.$D$7]*[.G144])">
            <text:p/>
          </table:table-cell>
          <table:table-cell table:style-name="ce439" table:formula="of:=IF([.C145]&gt;[.$D$9];&quot;&quot;;[.D145]-[.E145])">
            <text:p/>
          </table:table-cell>
          <table:table-cell table:style-name="ce433" table:formula="of:=IF([.C145]&gt;[.$D$9];&quot;&quot;;[.G144]-[.F14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5]=[.$D$9];[.C145]=&quot;&quot;);&quot;&quot;;IF(ISNUMBER([.C145]);[.C145]+1;1))">
            <text:p/>
          </table:table-cell>
          <table:table-cell table:style-name="ce433" table:formula="of:=IF([.C146]&gt;[.$D$9];&quot;&quot;;PMT([.$D$7];[.$D$9];[.$D$3])*-1)">
            <text:p/>
          </table:table-cell>
          <table:table-cell table:style-name="ce433" table:formula="of:=IF([.C146]&gt;[.$D$9];&quot;&quot;;[.$D$7]*[.G145])">
            <text:p/>
          </table:table-cell>
          <table:table-cell table:style-name="ce439" table:formula="of:=IF([.C146]&gt;[.$D$9];&quot;&quot;;[.D146]-[.E146])">
            <text:p/>
          </table:table-cell>
          <table:table-cell table:style-name="ce433" table:formula="of:=IF([.C146]&gt;[.$D$9];&quot;&quot;;[.G145]-[.F14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6]=[.$D$9];[.C146]=&quot;&quot;);&quot;&quot;;IF(ISNUMBER([.C146]);[.C146]+1;1))">
            <text:p/>
          </table:table-cell>
          <table:table-cell table:style-name="ce433" table:formula="of:=IF([.C147]&gt;[.$D$9];&quot;&quot;;PMT([.$D$7];[.$D$9];[.$D$3])*-1)">
            <text:p/>
          </table:table-cell>
          <table:table-cell table:style-name="ce433" table:formula="of:=IF([.C147]&gt;[.$D$9];&quot;&quot;;[.$D$7]*[.G146])">
            <text:p/>
          </table:table-cell>
          <table:table-cell table:style-name="ce439" table:formula="of:=IF([.C147]&gt;[.$D$9];&quot;&quot;;[.D147]-[.E147])">
            <text:p/>
          </table:table-cell>
          <table:table-cell table:style-name="ce433" table:formula="of:=IF([.C147]&gt;[.$D$9];&quot;&quot;;[.G146]-[.F14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7]=[.$D$9];[.C147]=&quot;&quot;);&quot;&quot;;IF(ISNUMBER([.C147]);[.C147]+1;1))">
            <text:p/>
          </table:table-cell>
          <table:table-cell table:style-name="ce433" table:formula="of:=IF([.C148]&gt;[.$D$9];&quot;&quot;;PMT([.$D$7];[.$D$9];[.$D$3])*-1)">
            <text:p/>
          </table:table-cell>
          <table:table-cell table:style-name="ce433" table:formula="of:=IF([.C148]&gt;[.$D$9];&quot;&quot;;[.$D$7]*[.G147])">
            <text:p/>
          </table:table-cell>
          <table:table-cell table:style-name="ce439" table:formula="of:=IF([.C148]&gt;[.$D$9];&quot;&quot;;[.D148]-[.E148])">
            <text:p/>
          </table:table-cell>
          <table:table-cell table:style-name="ce433" table:formula="of:=IF([.C148]&gt;[.$D$9];&quot;&quot;;[.G147]-[.F14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8]=[.$D$9];[.C148]=&quot;&quot;);&quot;&quot;;IF(ISNUMBER([.C148]);[.C148]+1;1))">
            <text:p/>
          </table:table-cell>
          <table:table-cell table:style-name="ce433" table:formula="of:=IF([.C149]&gt;[.$D$9];&quot;&quot;;PMT([.$D$7];[.$D$9];[.$D$3])*-1)">
            <text:p/>
          </table:table-cell>
          <table:table-cell table:style-name="ce433" table:formula="of:=IF([.C149]&gt;[.$D$9];&quot;&quot;;[.$D$7]*[.G148])">
            <text:p/>
          </table:table-cell>
          <table:table-cell table:style-name="ce439" table:formula="of:=IF([.C149]&gt;[.$D$9];&quot;&quot;;[.D149]-[.E149])">
            <text:p/>
          </table:table-cell>
          <table:table-cell table:style-name="ce433" table:formula="of:=IF([.C149]&gt;[.$D$9];&quot;&quot;;[.G148]-[.F14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49]=[.$D$9];[.C149]=&quot;&quot;);&quot;&quot;;IF(ISNUMBER([.C149]);[.C149]+1;1))">
            <text:p/>
          </table:table-cell>
          <table:table-cell table:style-name="ce433" table:formula="of:=IF([.C150]&gt;[.$D$9];&quot;&quot;;PMT([.$D$7];[.$D$9];[.$D$3])*-1)">
            <text:p/>
          </table:table-cell>
          <table:table-cell table:style-name="ce433" table:formula="of:=IF([.C150]&gt;[.$D$9];&quot;&quot;;[.$D$7]*[.G149])">
            <text:p/>
          </table:table-cell>
          <table:table-cell table:style-name="ce439" table:formula="of:=IF([.C150]&gt;[.$D$9];&quot;&quot;;[.D150]-[.E150])">
            <text:p/>
          </table:table-cell>
          <table:table-cell table:style-name="ce433" table:formula="of:=IF([.C150]&gt;[.$D$9];&quot;&quot;;[.G149]-[.F15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0]=[.$D$9];[.C150]=&quot;&quot;);&quot;&quot;;IF(ISNUMBER([.C150]);[.C150]+1;1))">
            <text:p/>
          </table:table-cell>
          <table:table-cell table:style-name="ce433" table:formula="of:=IF([.C151]&gt;[.$D$9];&quot;&quot;;PMT([.$D$7];[.$D$9];[.$D$3])*-1)">
            <text:p/>
          </table:table-cell>
          <table:table-cell table:style-name="ce433" table:formula="of:=IF([.C151]&gt;[.$D$9];&quot;&quot;;[.$D$7]*[.G150])">
            <text:p/>
          </table:table-cell>
          <table:table-cell table:style-name="ce439" table:formula="of:=IF([.C151]&gt;[.$D$9];&quot;&quot;;[.D151]-[.E151])">
            <text:p/>
          </table:table-cell>
          <table:table-cell table:style-name="ce433" table:formula="of:=IF([.C151]&gt;[.$D$9];&quot;&quot;;[.G150]-[.F15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1]=[.$D$9];[.C151]=&quot;&quot;);&quot;&quot;;IF(ISNUMBER([.C151]);[.C151]+1;1))">
            <text:p/>
          </table:table-cell>
          <table:table-cell table:style-name="ce433" table:formula="of:=IF([.C152]&gt;[.$D$9];&quot;&quot;;PMT([.$D$7];[.$D$9];[.$D$3])*-1)">
            <text:p/>
          </table:table-cell>
          <table:table-cell table:style-name="ce433" table:formula="of:=IF([.C152]&gt;[.$D$9];&quot;&quot;;[.$D$7]*[.G151])">
            <text:p/>
          </table:table-cell>
          <table:table-cell table:style-name="ce439" table:formula="of:=IF([.C152]&gt;[.$D$9];&quot;&quot;;[.D152]-[.E152])">
            <text:p/>
          </table:table-cell>
          <table:table-cell table:style-name="ce433" table:formula="of:=IF([.C152]&gt;[.$D$9];&quot;&quot;;[.G151]-[.F15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2]=[.$D$9];[.C152]=&quot;&quot;);&quot;&quot;;IF(ISNUMBER([.C152]);[.C152]+1;1))">
            <text:p/>
          </table:table-cell>
          <table:table-cell table:style-name="ce433" table:formula="of:=IF([.C153]&gt;[.$D$9];&quot;&quot;;PMT([.$D$7];[.$D$9];[.$D$3])*-1)">
            <text:p/>
          </table:table-cell>
          <table:table-cell table:style-name="ce433" table:formula="of:=IF([.C153]&gt;[.$D$9];&quot;&quot;;[.$D$7]*[.G152])">
            <text:p/>
          </table:table-cell>
          <table:table-cell table:style-name="ce439" table:formula="of:=IF([.C153]&gt;[.$D$9];&quot;&quot;;[.D153]-[.E153])">
            <text:p/>
          </table:table-cell>
          <table:table-cell table:style-name="ce433" table:formula="of:=IF([.C153]&gt;[.$D$9];&quot;&quot;;[.G152]-[.F15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3]=[.$D$9];[.C153]=&quot;&quot;);&quot;&quot;;IF(ISNUMBER([.C153]);[.C153]+1;1))">
            <text:p/>
          </table:table-cell>
          <table:table-cell table:style-name="ce433" table:formula="of:=IF([.C154]&gt;[.$D$9];&quot;&quot;;PMT([.$D$7];[.$D$9];[.$D$3])*-1)">
            <text:p/>
          </table:table-cell>
          <table:table-cell table:style-name="ce433" table:formula="of:=IF([.C154]&gt;[.$D$9];&quot;&quot;;[.$D$7]*[.G153])">
            <text:p/>
          </table:table-cell>
          <table:table-cell table:style-name="ce439" table:formula="of:=IF([.C154]&gt;[.$D$9];&quot;&quot;;[.D154]-[.E154])">
            <text:p/>
          </table:table-cell>
          <table:table-cell table:style-name="ce433" table:formula="of:=IF([.C154]&gt;[.$D$9];&quot;&quot;;[.G153]-[.F15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4]=[.$D$9];[.C154]=&quot;&quot;);&quot;&quot;;IF(ISNUMBER([.C154]);[.C154]+1;1))">
            <text:p/>
          </table:table-cell>
          <table:table-cell table:style-name="ce433" table:formula="of:=IF([.C155]&gt;[.$D$9];&quot;&quot;;PMT([.$D$7];[.$D$9];[.$D$3])*-1)">
            <text:p/>
          </table:table-cell>
          <table:table-cell table:style-name="ce433" table:formula="of:=IF([.C155]&gt;[.$D$9];&quot;&quot;;[.$D$7]*[.G154])">
            <text:p/>
          </table:table-cell>
          <table:table-cell table:style-name="ce439" table:formula="of:=IF([.C155]&gt;[.$D$9];&quot;&quot;;[.D155]-[.E155])">
            <text:p/>
          </table:table-cell>
          <table:table-cell table:style-name="ce433" table:formula="of:=IF([.C155]&gt;[.$D$9];&quot;&quot;;[.G154]-[.F15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5]=[.$D$9];[.C155]=&quot;&quot;);&quot;&quot;;IF(ISNUMBER([.C155]);[.C155]+1;1))">
            <text:p/>
          </table:table-cell>
          <table:table-cell table:style-name="ce433" table:formula="of:=IF([.C156]&gt;[.$D$9];&quot;&quot;;PMT([.$D$7];[.$D$9];[.$D$3])*-1)">
            <text:p/>
          </table:table-cell>
          <table:table-cell table:style-name="ce433" table:formula="of:=IF([.C156]&gt;[.$D$9];&quot;&quot;;[.$D$7]*[.G155])">
            <text:p/>
          </table:table-cell>
          <table:table-cell table:style-name="ce439" table:formula="of:=IF([.C156]&gt;[.$D$9];&quot;&quot;;[.D156]-[.E156])">
            <text:p/>
          </table:table-cell>
          <table:table-cell table:style-name="ce433" table:formula="of:=IF([.C156]&gt;[.$D$9];&quot;&quot;;[.G155]-[.F15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6]=[.$D$9];[.C156]=&quot;&quot;);&quot;&quot;;IF(ISNUMBER([.C156]);[.C156]+1;1))">
            <text:p/>
          </table:table-cell>
          <table:table-cell table:style-name="ce433" table:formula="of:=IF([.C157]&gt;[.$D$9];&quot;&quot;;PMT([.$D$7];[.$D$9];[.$D$3])*-1)">
            <text:p/>
          </table:table-cell>
          <table:table-cell table:style-name="ce433" table:formula="of:=IF([.C157]&gt;[.$D$9];&quot;&quot;;[.$D$7]*[.G156])">
            <text:p/>
          </table:table-cell>
          <table:table-cell table:style-name="ce439" table:formula="of:=IF([.C157]&gt;[.$D$9];&quot;&quot;;[.D157]-[.E157])">
            <text:p/>
          </table:table-cell>
          <table:table-cell table:style-name="ce433" table:formula="of:=IF([.C157]&gt;[.$D$9];&quot;&quot;;[.G156]-[.F15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7]=[.$D$9];[.C157]=&quot;&quot;);&quot;&quot;;IF(ISNUMBER([.C157]);[.C157]+1;1))">
            <text:p/>
          </table:table-cell>
          <table:table-cell table:style-name="ce433" table:formula="of:=IF([.C158]&gt;[.$D$9];&quot;&quot;;PMT([.$D$7];[.$D$9];[.$D$3])*-1)">
            <text:p/>
          </table:table-cell>
          <table:table-cell table:style-name="ce433" table:formula="of:=IF([.C158]&gt;[.$D$9];&quot;&quot;;[.$D$7]*[.G157])">
            <text:p/>
          </table:table-cell>
          <table:table-cell table:style-name="ce439" table:formula="of:=IF([.C158]&gt;[.$D$9];&quot;&quot;;[.D158]-[.E158])">
            <text:p/>
          </table:table-cell>
          <table:table-cell table:style-name="ce433" table:formula="of:=IF([.C158]&gt;[.$D$9];&quot;&quot;;[.G157]-[.F15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8]=[.$D$9];[.C158]=&quot;&quot;);&quot;&quot;;IF(ISNUMBER([.C158]);[.C158]+1;1))">
            <text:p/>
          </table:table-cell>
          <table:table-cell table:style-name="ce433" table:formula="of:=IF([.C159]&gt;[.$D$9];&quot;&quot;;PMT([.$D$7];[.$D$9];[.$D$3])*-1)">
            <text:p/>
          </table:table-cell>
          <table:table-cell table:style-name="ce433" table:formula="of:=IF([.C159]&gt;[.$D$9];&quot;&quot;;[.$D$7]*[.G158])">
            <text:p/>
          </table:table-cell>
          <table:table-cell table:style-name="ce439" table:formula="of:=IF([.C159]&gt;[.$D$9];&quot;&quot;;[.D159]-[.E159])">
            <text:p/>
          </table:table-cell>
          <table:table-cell table:style-name="ce433" table:formula="of:=IF([.C159]&gt;[.$D$9];&quot;&quot;;[.G158]-[.F15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59]=[.$D$9];[.C159]=&quot;&quot;);&quot;&quot;;IF(ISNUMBER([.C159]);[.C159]+1;1))">
            <text:p/>
          </table:table-cell>
          <table:table-cell table:style-name="ce433" table:formula="of:=IF([.C160]&gt;[.$D$9];&quot;&quot;;PMT([.$D$7];[.$D$9];[.$D$3])*-1)">
            <text:p/>
          </table:table-cell>
          <table:table-cell table:style-name="ce433" table:formula="of:=IF([.C160]&gt;[.$D$9];&quot;&quot;;[.$D$7]*[.G159])">
            <text:p/>
          </table:table-cell>
          <table:table-cell table:style-name="ce439" table:formula="of:=IF([.C160]&gt;[.$D$9];&quot;&quot;;[.D160]-[.E160])">
            <text:p/>
          </table:table-cell>
          <table:table-cell table:style-name="ce433" table:formula="of:=IF([.C160]&gt;[.$D$9];&quot;&quot;;[.G159]-[.F16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0]=[.$D$9];[.C160]=&quot;&quot;);&quot;&quot;;IF(ISNUMBER([.C160]);[.C160]+1;1))">
            <text:p/>
          </table:table-cell>
          <table:table-cell table:style-name="ce433" table:formula="of:=IF([.C161]&gt;[.$D$9];&quot;&quot;;PMT([.$D$7];[.$D$9];[.$D$3])*-1)">
            <text:p/>
          </table:table-cell>
          <table:table-cell table:style-name="ce433" table:formula="of:=IF([.C161]&gt;[.$D$9];&quot;&quot;;[.$D$7]*[.G160])">
            <text:p/>
          </table:table-cell>
          <table:table-cell table:style-name="ce439" table:formula="of:=IF([.C161]&gt;[.$D$9];&quot;&quot;;[.D161]-[.E161])">
            <text:p/>
          </table:table-cell>
          <table:table-cell table:style-name="ce433" table:formula="of:=IF([.C161]&gt;[.$D$9];&quot;&quot;;[.G160]-[.F16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1]=[.$D$9];[.C161]=&quot;&quot;);&quot;&quot;;IF(ISNUMBER([.C161]);[.C161]+1;1))">
            <text:p/>
          </table:table-cell>
          <table:table-cell table:style-name="ce433" table:formula="of:=IF([.C162]&gt;[.$D$9];&quot;&quot;;PMT([.$D$7];[.$D$9];[.$D$3])*-1)">
            <text:p/>
          </table:table-cell>
          <table:table-cell table:style-name="ce433" table:formula="of:=IF([.C162]&gt;[.$D$9];&quot;&quot;;[.$D$7]*[.G161])">
            <text:p/>
          </table:table-cell>
          <table:table-cell table:style-name="ce439" table:formula="of:=IF([.C162]&gt;[.$D$9];&quot;&quot;;[.D162]-[.E162])">
            <text:p/>
          </table:table-cell>
          <table:table-cell table:style-name="ce433" table:formula="of:=IF([.C162]&gt;[.$D$9];&quot;&quot;;[.G161]-[.F16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2]=[.$D$9];[.C162]=&quot;&quot;);&quot;&quot;;IF(ISNUMBER([.C162]);[.C162]+1;1))">
            <text:p/>
          </table:table-cell>
          <table:table-cell table:style-name="ce433" table:formula="of:=IF([.C163]&gt;[.$D$9];&quot;&quot;;PMT([.$D$7];[.$D$9];[.$D$3])*-1)">
            <text:p/>
          </table:table-cell>
          <table:table-cell table:style-name="ce433" table:formula="of:=IF([.C163]&gt;[.$D$9];&quot;&quot;;[.$D$7]*[.G162])">
            <text:p/>
          </table:table-cell>
          <table:table-cell table:style-name="ce439" table:formula="of:=IF([.C163]&gt;[.$D$9];&quot;&quot;;[.D163]-[.E163])">
            <text:p/>
          </table:table-cell>
          <table:table-cell table:style-name="ce433" table:formula="of:=IF([.C163]&gt;[.$D$9];&quot;&quot;;[.G162]-[.F16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3]=[.$D$9];[.C163]=&quot;&quot;);&quot;&quot;;IF(ISNUMBER([.C163]);[.C163]+1;1))">
            <text:p/>
          </table:table-cell>
          <table:table-cell table:style-name="ce433" table:formula="of:=IF([.C164]&gt;[.$D$9];&quot;&quot;;PMT([.$D$7];[.$D$9];[.$D$3])*-1)">
            <text:p/>
          </table:table-cell>
          <table:table-cell table:style-name="ce433" table:formula="of:=IF([.C164]&gt;[.$D$9];&quot;&quot;;[.$D$7]*[.G163])">
            <text:p/>
          </table:table-cell>
          <table:table-cell table:style-name="ce439" table:formula="of:=IF([.C164]&gt;[.$D$9];&quot;&quot;;[.D164]-[.E164])">
            <text:p/>
          </table:table-cell>
          <table:table-cell table:style-name="ce433" table:formula="of:=IF([.C164]&gt;[.$D$9];&quot;&quot;;[.G163]-[.F16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4]=[.$D$9];[.C164]=&quot;&quot;);&quot;&quot;;IF(ISNUMBER([.C164]);[.C164]+1;1))">
            <text:p/>
          </table:table-cell>
          <table:table-cell table:style-name="ce433" table:formula="of:=IF([.C165]&gt;[.$D$9];&quot;&quot;;PMT([.$D$7];[.$D$9];[.$D$3])*-1)">
            <text:p/>
          </table:table-cell>
          <table:table-cell table:style-name="ce433" table:formula="of:=IF([.C165]&gt;[.$D$9];&quot;&quot;;[.$D$7]*[.G164])">
            <text:p/>
          </table:table-cell>
          <table:table-cell table:style-name="ce439" table:formula="of:=IF([.C165]&gt;[.$D$9];&quot;&quot;;[.D165]-[.E165])">
            <text:p/>
          </table:table-cell>
          <table:table-cell table:style-name="ce433" table:formula="of:=IF([.C165]&gt;[.$D$9];&quot;&quot;;[.G164]-[.F16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5]=[.$D$9];[.C165]=&quot;&quot;);&quot;&quot;;IF(ISNUMBER([.C165]);[.C165]+1;1))">
            <text:p/>
          </table:table-cell>
          <table:table-cell table:style-name="ce433" table:formula="of:=IF([.C166]&gt;[.$D$9];&quot;&quot;;PMT([.$D$7];[.$D$9];[.$D$3])*-1)">
            <text:p/>
          </table:table-cell>
          <table:table-cell table:style-name="ce433" table:formula="of:=IF([.C166]&gt;[.$D$9];&quot;&quot;;[.$D$7]*[.G165])">
            <text:p/>
          </table:table-cell>
          <table:table-cell table:style-name="ce439" table:formula="of:=IF([.C166]&gt;[.$D$9];&quot;&quot;;[.D166]-[.E166])">
            <text:p/>
          </table:table-cell>
          <table:table-cell table:style-name="ce433" table:formula="of:=IF([.C166]&gt;[.$D$9];&quot;&quot;;[.G165]-[.F16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6]=[.$D$9];[.C166]=&quot;&quot;);&quot;&quot;;IF(ISNUMBER([.C166]);[.C166]+1;1))">
            <text:p/>
          </table:table-cell>
          <table:table-cell table:style-name="ce433" table:formula="of:=IF([.C167]&gt;[.$D$9];&quot;&quot;;PMT([.$D$7];[.$D$9];[.$D$3])*-1)">
            <text:p/>
          </table:table-cell>
          <table:table-cell table:style-name="ce433" table:formula="of:=IF([.C167]&gt;[.$D$9];&quot;&quot;;[.$D$7]*[.G166])">
            <text:p/>
          </table:table-cell>
          <table:table-cell table:style-name="ce439" table:formula="of:=IF([.C167]&gt;[.$D$9];&quot;&quot;;[.D167]-[.E167])">
            <text:p/>
          </table:table-cell>
          <table:table-cell table:style-name="ce433" table:formula="of:=IF([.C167]&gt;[.$D$9];&quot;&quot;;[.G166]-[.F16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7]=[.$D$9];[.C167]=&quot;&quot;);&quot;&quot;;IF(ISNUMBER([.C167]);[.C167]+1;1))">
            <text:p/>
          </table:table-cell>
          <table:table-cell table:style-name="ce433" table:formula="of:=IF([.C168]&gt;[.$D$9];&quot;&quot;;PMT([.$D$7];[.$D$9];[.$D$3])*-1)">
            <text:p/>
          </table:table-cell>
          <table:table-cell table:style-name="ce433" table:formula="of:=IF([.C168]&gt;[.$D$9];&quot;&quot;;[.$D$7]*[.G167])">
            <text:p/>
          </table:table-cell>
          <table:table-cell table:style-name="ce439" table:formula="of:=IF([.C168]&gt;[.$D$9];&quot;&quot;;[.D168]-[.E168])">
            <text:p/>
          </table:table-cell>
          <table:table-cell table:style-name="ce433" table:formula="of:=IF([.C168]&gt;[.$D$9];&quot;&quot;;[.G167]-[.F16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8]=[.$D$9];[.C168]=&quot;&quot;);&quot;&quot;;IF(ISNUMBER([.C168]);[.C168]+1;1))">
            <text:p/>
          </table:table-cell>
          <table:table-cell table:style-name="ce433" table:formula="of:=IF([.C169]&gt;[.$D$9];&quot;&quot;;PMT([.$D$7];[.$D$9];[.$D$3])*-1)">
            <text:p/>
          </table:table-cell>
          <table:table-cell table:style-name="ce433" table:formula="of:=IF([.C169]&gt;[.$D$9];&quot;&quot;;[.$D$7]*[.G168])">
            <text:p/>
          </table:table-cell>
          <table:table-cell table:style-name="ce439" table:formula="of:=IF([.C169]&gt;[.$D$9];&quot;&quot;;[.D169]-[.E169])">
            <text:p/>
          </table:table-cell>
          <table:table-cell table:style-name="ce433" table:formula="of:=IF([.C169]&gt;[.$D$9];&quot;&quot;;[.G168]-[.F16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69]=[.$D$9];[.C169]=&quot;&quot;);&quot;&quot;;IF(ISNUMBER([.C169]);[.C169]+1;1))">
            <text:p/>
          </table:table-cell>
          <table:table-cell table:style-name="ce433" table:formula="of:=IF([.C170]&gt;[.$D$9];&quot;&quot;;PMT([.$D$7];[.$D$9];[.$D$3])*-1)">
            <text:p/>
          </table:table-cell>
          <table:table-cell table:style-name="ce433" table:formula="of:=IF([.C170]&gt;[.$D$9];&quot;&quot;;[.$D$7]*[.G169])">
            <text:p/>
          </table:table-cell>
          <table:table-cell table:style-name="ce439" table:formula="of:=IF([.C170]&gt;[.$D$9];&quot;&quot;;[.D170]-[.E170])">
            <text:p/>
          </table:table-cell>
          <table:table-cell table:style-name="ce433" table:formula="of:=IF([.C170]&gt;[.$D$9];&quot;&quot;;[.G169]-[.F17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0]=[.$D$9];[.C170]=&quot;&quot;);&quot;&quot;;IF(ISNUMBER([.C170]);[.C170]+1;1))">
            <text:p/>
          </table:table-cell>
          <table:table-cell table:style-name="ce433" table:formula="of:=IF([.C171]&gt;[.$D$9];&quot;&quot;;PMT([.$D$7];[.$D$9];[.$D$3])*-1)">
            <text:p/>
          </table:table-cell>
          <table:table-cell table:style-name="ce433" table:formula="of:=IF([.C171]&gt;[.$D$9];&quot;&quot;;[.$D$7]*[.G170])">
            <text:p/>
          </table:table-cell>
          <table:table-cell table:style-name="ce439" table:formula="of:=IF([.C171]&gt;[.$D$9];&quot;&quot;;[.D171]-[.E171])">
            <text:p/>
          </table:table-cell>
          <table:table-cell table:style-name="ce433" table:formula="of:=IF([.C171]&gt;[.$D$9];&quot;&quot;;[.G170]-[.F17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1]=[.$D$9];[.C171]=&quot;&quot;);&quot;&quot;;IF(ISNUMBER([.C171]);[.C171]+1;1))">
            <text:p/>
          </table:table-cell>
          <table:table-cell table:style-name="ce433" table:formula="of:=IF([.C172]&gt;[.$D$9];&quot;&quot;;PMT([.$D$7];[.$D$9];[.$D$3])*-1)">
            <text:p/>
          </table:table-cell>
          <table:table-cell table:style-name="ce433" table:formula="of:=IF([.C172]&gt;[.$D$9];&quot;&quot;;[.$D$7]*[.G171])">
            <text:p/>
          </table:table-cell>
          <table:table-cell table:style-name="ce439" table:formula="of:=IF([.C172]&gt;[.$D$9];&quot;&quot;;[.D172]-[.E172])">
            <text:p/>
          </table:table-cell>
          <table:table-cell table:style-name="ce433" table:formula="of:=IF([.C172]&gt;[.$D$9];&quot;&quot;;[.G171]-[.F17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2]=[.$D$9];[.C172]=&quot;&quot;);&quot;&quot;;IF(ISNUMBER([.C172]);[.C172]+1;1))">
            <text:p/>
          </table:table-cell>
          <table:table-cell table:style-name="ce433" table:formula="of:=IF([.C173]&gt;[.$D$9];&quot;&quot;;PMT([.$D$7];[.$D$9];[.$D$3])*-1)">
            <text:p/>
          </table:table-cell>
          <table:table-cell table:style-name="ce433" table:formula="of:=IF([.C173]&gt;[.$D$9];&quot;&quot;;[.$D$7]*[.G172])">
            <text:p/>
          </table:table-cell>
          <table:table-cell table:style-name="ce439" table:formula="of:=IF([.C173]&gt;[.$D$9];&quot;&quot;;[.D173]-[.E173])">
            <text:p/>
          </table:table-cell>
          <table:table-cell table:style-name="ce433" table:formula="of:=IF([.C173]&gt;[.$D$9];&quot;&quot;;[.G172]-[.F17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3]=[.$D$9];[.C173]=&quot;&quot;);&quot;&quot;;IF(ISNUMBER([.C173]);[.C173]+1;1))">
            <text:p/>
          </table:table-cell>
          <table:table-cell table:style-name="ce433" table:formula="of:=IF([.C174]&gt;[.$D$9];&quot;&quot;;PMT([.$D$7];[.$D$9];[.$D$3])*-1)">
            <text:p/>
          </table:table-cell>
          <table:table-cell table:style-name="ce433" table:formula="of:=IF([.C174]&gt;[.$D$9];&quot;&quot;;[.$D$7]*[.G173])">
            <text:p/>
          </table:table-cell>
          <table:table-cell table:style-name="ce439" table:formula="of:=IF([.C174]&gt;[.$D$9];&quot;&quot;;[.D174]-[.E174])">
            <text:p/>
          </table:table-cell>
          <table:table-cell table:style-name="ce433" table:formula="of:=IF([.C174]&gt;[.$D$9];&quot;&quot;;[.G173]-[.F17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4]=[.$D$9];[.C174]=&quot;&quot;);&quot;&quot;;IF(ISNUMBER([.C174]);[.C174]+1;1))">
            <text:p/>
          </table:table-cell>
          <table:table-cell table:style-name="ce433" table:formula="of:=IF([.C175]&gt;[.$D$9];&quot;&quot;;PMT([.$D$7];[.$D$9];[.$D$3])*-1)">
            <text:p/>
          </table:table-cell>
          <table:table-cell table:style-name="ce433" table:formula="of:=IF([.C175]&gt;[.$D$9];&quot;&quot;;[.$D$7]*[.G174])">
            <text:p/>
          </table:table-cell>
          <table:table-cell table:style-name="ce439" table:formula="of:=IF([.C175]&gt;[.$D$9];&quot;&quot;;[.D175]-[.E175])">
            <text:p/>
          </table:table-cell>
          <table:table-cell table:style-name="ce433" table:formula="of:=IF([.C175]&gt;[.$D$9];&quot;&quot;;[.G174]-[.F17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5]=[.$D$9];[.C175]=&quot;&quot;);&quot;&quot;;IF(ISNUMBER([.C175]);[.C175]+1;1))">
            <text:p/>
          </table:table-cell>
          <table:table-cell table:style-name="ce433" table:formula="of:=IF([.C176]&gt;[.$D$9];&quot;&quot;;PMT([.$D$7];[.$D$9];[.$D$3])*-1)">
            <text:p/>
          </table:table-cell>
          <table:table-cell table:style-name="ce433" table:formula="of:=IF([.C176]&gt;[.$D$9];&quot;&quot;;[.$D$7]*[.G175])">
            <text:p/>
          </table:table-cell>
          <table:table-cell table:style-name="ce439" table:formula="of:=IF([.C176]&gt;[.$D$9];&quot;&quot;;[.D176]-[.E176])">
            <text:p/>
          </table:table-cell>
          <table:table-cell table:style-name="ce433" table:formula="of:=IF([.C176]&gt;[.$D$9];&quot;&quot;;[.G175]-[.F17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6]=[.$D$9];[.C176]=&quot;&quot;);&quot;&quot;;IF(ISNUMBER([.C176]);[.C176]+1;1))">
            <text:p/>
          </table:table-cell>
          <table:table-cell table:style-name="ce433" table:formula="of:=IF([.C177]&gt;[.$D$9];&quot;&quot;;PMT([.$D$7];[.$D$9];[.$D$3])*-1)">
            <text:p/>
          </table:table-cell>
          <table:table-cell table:style-name="ce433" table:formula="of:=IF([.C177]&gt;[.$D$9];&quot;&quot;;[.$D$7]*[.G176])">
            <text:p/>
          </table:table-cell>
          <table:table-cell table:style-name="ce439" table:formula="of:=IF([.C177]&gt;[.$D$9];&quot;&quot;;[.D177]-[.E177])">
            <text:p/>
          </table:table-cell>
          <table:table-cell table:style-name="ce433" table:formula="of:=IF([.C177]&gt;[.$D$9];&quot;&quot;;[.G176]-[.F17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7]=[.$D$9];[.C177]=&quot;&quot;);&quot;&quot;;IF(ISNUMBER([.C177]);[.C177]+1;1))">
            <text:p/>
          </table:table-cell>
          <table:table-cell table:style-name="ce433" table:formula="of:=IF([.C178]&gt;[.$D$9];&quot;&quot;;PMT([.$D$7];[.$D$9];[.$D$3])*-1)">
            <text:p/>
          </table:table-cell>
          <table:table-cell table:style-name="ce433" table:formula="of:=IF([.C178]&gt;[.$D$9];&quot;&quot;;[.$D$7]*[.G177])">
            <text:p/>
          </table:table-cell>
          <table:table-cell table:style-name="ce439" table:formula="of:=IF([.C178]&gt;[.$D$9];&quot;&quot;;[.D178]-[.E178])">
            <text:p/>
          </table:table-cell>
          <table:table-cell table:style-name="ce433" table:formula="of:=IF([.C178]&gt;[.$D$9];&quot;&quot;;[.G177]-[.F17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8]=[.$D$9];[.C178]=&quot;&quot;);&quot;&quot;;IF(ISNUMBER([.C178]);[.C178]+1;1))">
            <text:p/>
          </table:table-cell>
          <table:table-cell table:style-name="ce433" table:formula="of:=IF([.C179]&gt;[.$D$9];&quot;&quot;;PMT([.$D$7];[.$D$9];[.$D$3])*-1)">
            <text:p/>
          </table:table-cell>
          <table:table-cell table:style-name="ce433" table:formula="of:=IF([.C179]&gt;[.$D$9];&quot;&quot;;[.$D$7]*[.G178])">
            <text:p/>
          </table:table-cell>
          <table:table-cell table:style-name="ce439" table:formula="of:=IF([.C179]&gt;[.$D$9];&quot;&quot;;[.D179]-[.E179])">
            <text:p/>
          </table:table-cell>
          <table:table-cell table:style-name="ce433" table:formula="of:=IF([.C179]&gt;[.$D$9];&quot;&quot;;[.G178]-[.F17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79]=[.$D$9];[.C179]=&quot;&quot;);&quot;&quot;;IF(ISNUMBER([.C179]);[.C179]+1;1))">
            <text:p/>
          </table:table-cell>
          <table:table-cell table:style-name="ce433" table:formula="of:=IF([.C180]&gt;[.$D$9];&quot;&quot;;PMT([.$D$7];[.$D$9];[.$D$3])*-1)">
            <text:p/>
          </table:table-cell>
          <table:table-cell table:style-name="ce433" table:formula="of:=IF([.C180]&gt;[.$D$9];&quot;&quot;;[.$D$7]*[.G179])">
            <text:p/>
          </table:table-cell>
          <table:table-cell table:style-name="ce439" table:formula="of:=IF([.C180]&gt;[.$D$9];&quot;&quot;;[.D180]-[.E180])">
            <text:p/>
          </table:table-cell>
          <table:table-cell table:style-name="ce433" table:formula="of:=IF([.C180]&gt;[.$D$9];&quot;&quot;;[.G179]-[.F18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0]=[.$D$9];[.C180]=&quot;&quot;);&quot;&quot;;IF(ISNUMBER([.C180]);[.C180]+1;1))">
            <text:p/>
          </table:table-cell>
          <table:table-cell table:style-name="ce433" table:formula="of:=IF([.C181]&gt;[.$D$9];&quot;&quot;;PMT([.$D$7];[.$D$9];[.$D$3])*-1)">
            <text:p/>
          </table:table-cell>
          <table:table-cell table:style-name="ce433" table:formula="of:=IF([.C181]&gt;[.$D$9];&quot;&quot;;[.$D$7]*[.G180])">
            <text:p/>
          </table:table-cell>
          <table:table-cell table:style-name="ce439" table:formula="of:=IF([.C181]&gt;[.$D$9];&quot;&quot;;[.D181]-[.E181])">
            <text:p/>
          </table:table-cell>
          <table:table-cell table:style-name="ce433" table:formula="of:=IF([.C181]&gt;[.$D$9];&quot;&quot;;[.G180]-[.F18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1]=[.$D$9];[.C181]=&quot;&quot;);&quot;&quot;;IF(ISNUMBER([.C181]);[.C181]+1;1))">
            <text:p/>
          </table:table-cell>
          <table:table-cell table:style-name="ce433" table:formula="of:=IF([.C182]&gt;[.$D$9];&quot;&quot;;PMT([.$D$7];[.$D$9];[.$D$3])*-1)">
            <text:p/>
          </table:table-cell>
          <table:table-cell table:style-name="ce433" table:formula="of:=IF([.C182]&gt;[.$D$9];&quot;&quot;;[.$D$7]*[.G181])">
            <text:p/>
          </table:table-cell>
          <table:table-cell table:style-name="ce439" table:formula="of:=IF([.C182]&gt;[.$D$9];&quot;&quot;;[.D182]-[.E182])">
            <text:p/>
          </table:table-cell>
          <table:table-cell table:style-name="ce433" table:formula="of:=IF([.C182]&gt;[.$D$9];&quot;&quot;;[.G181]-[.F18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2]=[.$D$9];[.C182]=&quot;&quot;);&quot;&quot;;IF(ISNUMBER([.C182]);[.C182]+1;1))">
            <text:p/>
          </table:table-cell>
          <table:table-cell table:style-name="ce433" table:formula="of:=IF([.C183]&gt;[.$D$9];&quot;&quot;;PMT([.$D$7];[.$D$9];[.$D$3])*-1)">
            <text:p/>
          </table:table-cell>
          <table:table-cell table:style-name="ce433" table:formula="of:=IF([.C183]&gt;[.$D$9];&quot;&quot;;[.$D$7]*[.G182])">
            <text:p/>
          </table:table-cell>
          <table:table-cell table:style-name="ce439" table:formula="of:=IF([.C183]&gt;[.$D$9];&quot;&quot;;[.D183]-[.E183])">
            <text:p/>
          </table:table-cell>
          <table:table-cell table:style-name="ce433" table:formula="of:=IF([.C183]&gt;[.$D$9];&quot;&quot;;[.G182]-[.F18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3]=[.$D$9];[.C183]=&quot;&quot;);&quot;&quot;;IF(ISNUMBER([.C183]);[.C183]+1;1))">
            <text:p/>
          </table:table-cell>
          <table:table-cell table:style-name="ce433" table:formula="of:=IF([.C184]&gt;[.$D$9];&quot;&quot;;PMT([.$D$7];[.$D$9];[.$D$3])*-1)">
            <text:p/>
          </table:table-cell>
          <table:table-cell table:style-name="ce433" table:formula="of:=IF([.C184]&gt;[.$D$9];&quot;&quot;;[.$D$7]*[.G183])">
            <text:p/>
          </table:table-cell>
          <table:table-cell table:style-name="ce439" table:formula="of:=IF([.C184]&gt;[.$D$9];&quot;&quot;;[.D184]-[.E184])">
            <text:p/>
          </table:table-cell>
          <table:table-cell table:style-name="ce433" table:formula="of:=IF([.C184]&gt;[.$D$9];&quot;&quot;;[.G183]-[.F18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4]=[.$D$9];[.C184]=&quot;&quot;);&quot;&quot;;IF(ISNUMBER([.C184]);[.C184]+1;1))">
            <text:p/>
          </table:table-cell>
          <table:table-cell table:style-name="ce433" table:formula="of:=IF([.C185]&gt;[.$D$9];&quot;&quot;;PMT([.$D$7];[.$D$9];[.$D$3])*-1)">
            <text:p/>
          </table:table-cell>
          <table:table-cell table:style-name="ce433" table:formula="of:=IF([.C185]&gt;[.$D$9];&quot;&quot;;[.$D$7]*[.G184])">
            <text:p/>
          </table:table-cell>
          <table:table-cell table:style-name="ce439" table:formula="of:=IF([.C185]&gt;[.$D$9];&quot;&quot;;[.D185]-[.E185])">
            <text:p/>
          </table:table-cell>
          <table:table-cell table:style-name="ce433" table:formula="of:=IF([.C185]&gt;[.$D$9];&quot;&quot;;[.G184]-[.F18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5]=[.$D$9];[.C185]=&quot;&quot;);&quot;&quot;;IF(ISNUMBER([.C185]);[.C185]+1;1))">
            <text:p/>
          </table:table-cell>
          <table:table-cell table:style-name="ce433" table:formula="of:=IF([.C186]&gt;[.$D$9];&quot;&quot;;PMT([.$D$7];[.$D$9];[.$D$3])*-1)">
            <text:p/>
          </table:table-cell>
          <table:table-cell table:style-name="ce433" table:formula="of:=IF([.C186]&gt;[.$D$9];&quot;&quot;;[.$D$7]*[.G185])">
            <text:p/>
          </table:table-cell>
          <table:table-cell table:style-name="ce439" table:formula="of:=IF([.C186]&gt;[.$D$9];&quot;&quot;;[.D186]-[.E186])">
            <text:p/>
          </table:table-cell>
          <table:table-cell table:style-name="ce433" table:formula="of:=IF([.C186]&gt;[.$D$9];&quot;&quot;;[.G185]-[.F18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6]=[.$D$9];[.C186]=&quot;&quot;);&quot;&quot;;IF(ISNUMBER([.C186]);[.C186]+1;1))">
            <text:p/>
          </table:table-cell>
          <table:table-cell table:style-name="ce433" table:formula="of:=IF([.C187]&gt;[.$D$9];&quot;&quot;;PMT([.$D$7];[.$D$9];[.$D$3])*-1)">
            <text:p/>
          </table:table-cell>
          <table:table-cell table:style-name="ce433" table:formula="of:=IF([.C187]&gt;[.$D$9];&quot;&quot;;[.$D$7]*[.G186])">
            <text:p/>
          </table:table-cell>
          <table:table-cell table:style-name="ce439" table:formula="of:=IF([.C187]&gt;[.$D$9];&quot;&quot;;[.D187]-[.E187])">
            <text:p/>
          </table:table-cell>
          <table:table-cell table:style-name="ce433" table:formula="of:=IF([.C187]&gt;[.$D$9];&quot;&quot;;[.G186]-[.F18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7]=[.$D$9];[.C187]=&quot;&quot;);&quot;&quot;;IF(ISNUMBER([.C187]);[.C187]+1;1))">
            <text:p/>
          </table:table-cell>
          <table:table-cell table:style-name="ce433" table:formula="of:=IF([.C188]&gt;[.$D$9];&quot;&quot;;PMT([.$D$7];[.$D$9];[.$D$3])*-1)">
            <text:p/>
          </table:table-cell>
          <table:table-cell table:style-name="ce433" table:formula="of:=IF([.C188]&gt;[.$D$9];&quot;&quot;;[.$D$7]*[.G187])">
            <text:p/>
          </table:table-cell>
          <table:table-cell table:style-name="ce439" table:formula="of:=IF([.C188]&gt;[.$D$9];&quot;&quot;;[.D188]-[.E188])">
            <text:p/>
          </table:table-cell>
          <table:table-cell table:style-name="ce433" table:formula="of:=IF([.C188]&gt;[.$D$9];&quot;&quot;;[.G187]-[.F18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8]=[.$D$9];[.C188]=&quot;&quot;);&quot;&quot;;IF(ISNUMBER([.C188]);[.C188]+1;1))">
            <text:p/>
          </table:table-cell>
          <table:table-cell table:style-name="ce433" table:formula="of:=IF([.C189]&gt;[.$D$9];&quot;&quot;;PMT([.$D$7];[.$D$9];[.$D$3])*-1)">
            <text:p/>
          </table:table-cell>
          <table:table-cell table:style-name="ce433" table:formula="of:=IF([.C189]&gt;[.$D$9];&quot;&quot;;[.$D$7]*[.G188])">
            <text:p/>
          </table:table-cell>
          <table:table-cell table:style-name="ce439" table:formula="of:=IF([.C189]&gt;[.$D$9];&quot;&quot;;[.D189]-[.E189])">
            <text:p/>
          </table:table-cell>
          <table:table-cell table:style-name="ce433" table:formula="of:=IF([.C189]&gt;[.$D$9];&quot;&quot;;[.G188]-[.F18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89]=[.$D$9];[.C189]=&quot;&quot;);&quot;&quot;;IF(ISNUMBER([.C189]);[.C189]+1;1))">
            <text:p/>
          </table:table-cell>
          <table:table-cell table:style-name="ce433" table:formula="of:=IF([.C190]&gt;[.$D$9];&quot;&quot;;PMT([.$D$7];[.$D$9];[.$D$3])*-1)">
            <text:p/>
          </table:table-cell>
          <table:table-cell table:style-name="ce433" table:formula="of:=IF([.C190]&gt;[.$D$9];&quot;&quot;;[.$D$7]*[.G189])">
            <text:p/>
          </table:table-cell>
          <table:table-cell table:style-name="ce439" table:formula="of:=IF([.C190]&gt;[.$D$9];&quot;&quot;;[.D190]-[.E190])">
            <text:p/>
          </table:table-cell>
          <table:table-cell table:style-name="ce433" table:formula="of:=IF([.C190]&gt;[.$D$9];&quot;&quot;;[.G189]-[.F19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0]=[.$D$9];[.C190]=&quot;&quot;);&quot;&quot;;IF(ISNUMBER([.C190]);[.C190]+1;1))">
            <text:p/>
          </table:table-cell>
          <table:table-cell table:style-name="ce433" table:formula="of:=IF([.C191]&gt;[.$D$9];&quot;&quot;;PMT([.$D$7];[.$D$9];[.$D$3])*-1)">
            <text:p/>
          </table:table-cell>
          <table:table-cell table:style-name="ce433" table:formula="of:=IF([.C191]&gt;[.$D$9];&quot;&quot;;[.$D$7]*[.G190])">
            <text:p/>
          </table:table-cell>
          <table:table-cell table:style-name="ce439" table:formula="of:=IF([.C191]&gt;[.$D$9];&quot;&quot;;[.D191]-[.E191])">
            <text:p/>
          </table:table-cell>
          <table:table-cell table:style-name="ce433" table:formula="of:=IF([.C191]&gt;[.$D$9];&quot;&quot;;[.G190]-[.F19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1]=[.$D$9];[.C191]=&quot;&quot;);&quot;&quot;;IF(ISNUMBER([.C191]);[.C191]+1;1))">
            <text:p/>
          </table:table-cell>
          <table:table-cell table:style-name="ce433" table:formula="of:=IF([.C192]&gt;[.$D$9];&quot;&quot;;PMT([.$D$7];[.$D$9];[.$D$3])*-1)">
            <text:p/>
          </table:table-cell>
          <table:table-cell table:style-name="ce433" table:formula="of:=IF([.C192]&gt;[.$D$9];&quot;&quot;;[.$D$7]*[.G191])">
            <text:p/>
          </table:table-cell>
          <table:table-cell table:style-name="ce439" table:formula="of:=IF([.C192]&gt;[.$D$9];&quot;&quot;;[.D192]-[.E192])">
            <text:p/>
          </table:table-cell>
          <table:table-cell table:style-name="ce433" table:formula="of:=IF([.C192]&gt;[.$D$9];&quot;&quot;;[.G191]-[.F19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2]=[.$D$9];[.C192]=&quot;&quot;);&quot;&quot;;IF(ISNUMBER([.C192]);[.C192]+1;1))">
            <text:p/>
          </table:table-cell>
          <table:table-cell table:style-name="ce433" table:formula="of:=IF([.C193]&gt;[.$D$9];&quot;&quot;;PMT([.$D$7];[.$D$9];[.$D$3])*-1)">
            <text:p/>
          </table:table-cell>
          <table:table-cell table:style-name="ce433" table:formula="of:=IF([.C193]&gt;[.$D$9];&quot;&quot;;[.$D$7]*[.G192])">
            <text:p/>
          </table:table-cell>
          <table:table-cell table:style-name="ce439" table:formula="of:=IF([.C193]&gt;[.$D$9];&quot;&quot;;[.D193]-[.E193])">
            <text:p/>
          </table:table-cell>
          <table:table-cell table:style-name="ce433" table:formula="of:=IF([.C193]&gt;[.$D$9];&quot;&quot;;[.G192]-[.F19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3]=[.$D$9];[.C193]=&quot;&quot;);&quot;&quot;;IF(ISNUMBER([.C193]);[.C193]+1;1))">
            <text:p/>
          </table:table-cell>
          <table:table-cell table:style-name="ce433" table:formula="of:=IF([.C194]&gt;[.$D$9];&quot;&quot;;PMT([.$D$7];[.$D$9];[.$D$3])*-1)">
            <text:p/>
          </table:table-cell>
          <table:table-cell table:style-name="ce433" table:formula="of:=IF([.C194]&gt;[.$D$9];&quot;&quot;;[.$D$7]*[.G193])">
            <text:p/>
          </table:table-cell>
          <table:table-cell table:style-name="ce439" table:formula="of:=IF([.C194]&gt;[.$D$9];&quot;&quot;;[.D194]-[.E194])">
            <text:p/>
          </table:table-cell>
          <table:table-cell table:style-name="ce433" table:formula="of:=IF([.C194]&gt;[.$D$9];&quot;&quot;;[.G193]-[.F19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4]=[.$D$9];[.C194]=&quot;&quot;);&quot;&quot;;IF(ISNUMBER([.C194]);[.C194]+1;1))">
            <text:p/>
          </table:table-cell>
          <table:table-cell table:style-name="ce433" table:formula="of:=IF([.C195]&gt;[.$D$9];&quot;&quot;;PMT([.$D$7];[.$D$9];[.$D$3])*-1)">
            <text:p/>
          </table:table-cell>
          <table:table-cell table:style-name="ce433" table:formula="of:=IF([.C195]&gt;[.$D$9];&quot;&quot;;[.$D$7]*[.G194])">
            <text:p/>
          </table:table-cell>
          <table:table-cell table:style-name="ce439" table:formula="of:=IF([.C195]&gt;[.$D$9];&quot;&quot;;[.D195]-[.E195])">
            <text:p/>
          </table:table-cell>
          <table:table-cell table:style-name="ce433" table:formula="of:=IF([.C195]&gt;[.$D$9];&quot;&quot;;[.G194]-[.F19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5]=[.$D$9];[.C195]=&quot;&quot;);&quot;&quot;;IF(ISNUMBER([.C195]);[.C195]+1;1))">
            <text:p/>
          </table:table-cell>
          <table:table-cell table:style-name="ce433" table:formula="of:=IF([.C196]&gt;[.$D$9];&quot;&quot;;PMT([.$D$7];[.$D$9];[.$D$3])*-1)">
            <text:p/>
          </table:table-cell>
          <table:table-cell table:style-name="ce433" table:formula="of:=IF([.C196]&gt;[.$D$9];&quot;&quot;;[.$D$7]*[.G195])">
            <text:p/>
          </table:table-cell>
          <table:table-cell table:style-name="ce439" table:formula="of:=IF([.C196]&gt;[.$D$9];&quot;&quot;;[.D196]-[.E196])">
            <text:p/>
          </table:table-cell>
          <table:table-cell table:style-name="ce433" table:formula="of:=IF([.C196]&gt;[.$D$9];&quot;&quot;;[.G195]-[.F19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6]=[.$D$9];[.C196]=&quot;&quot;);&quot;&quot;;IF(ISNUMBER([.C196]);[.C196]+1;1))">
            <text:p/>
          </table:table-cell>
          <table:table-cell table:style-name="ce433" table:formula="of:=IF([.C197]&gt;[.$D$9];&quot;&quot;;PMT([.$D$7];[.$D$9];[.$D$3])*-1)">
            <text:p/>
          </table:table-cell>
          <table:table-cell table:style-name="ce433" table:formula="of:=IF([.C197]&gt;[.$D$9];&quot;&quot;;[.$D$7]*[.G196])">
            <text:p/>
          </table:table-cell>
          <table:table-cell table:style-name="ce439" table:formula="of:=IF([.C197]&gt;[.$D$9];&quot;&quot;;[.D197]-[.E197])">
            <text:p/>
          </table:table-cell>
          <table:table-cell table:style-name="ce433" table:formula="of:=IF([.C197]&gt;[.$D$9];&quot;&quot;;[.G196]-[.F19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7]=[.$D$9];[.C197]=&quot;&quot;);&quot;&quot;;IF(ISNUMBER([.C197]);[.C197]+1;1))">
            <text:p/>
          </table:table-cell>
          <table:table-cell table:style-name="ce433" table:formula="of:=IF([.C198]&gt;[.$D$9];&quot;&quot;;PMT([.$D$7];[.$D$9];[.$D$3])*-1)">
            <text:p/>
          </table:table-cell>
          <table:table-cell table:style-name="ce433" table:formula="of:=IF([.C198]&gt;[.$D$9];&quot;&quot;;[.$D$7]*[.G197])">
            <text:p/>
          </table:table-cell>
          <table:table-cell table:style-name="ce439" table:formula="of:=IF([.C198]&gt;[.$D$9];&quot;&quot;;[.D198]-[.E198])">
            <text:p/>
          </table:table-cell>
          <table:table-cell table:style-name="ce433" table:formula="of:=IF([.C198]&gt;[.$D$9];&quot;&quot;;[.G197]-[.F19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8]=[.$D$9];[.C198]=&quot;&quot;);&quot;&quot;;IF(ISNUMBER([.C198]);[.C198]+1;1))">
            <text:p/>
          </table:table-cell>
          <table:table-cell table:style-name="ce433" table:formula="of:=IF([.C199]&gt;[.$D$9];&quot;&quot;;PMT([.$D$7];[.$D$9];[.$D$3])*-1)">
            <text:p/>
          </table:table-cell>
          <table:table-cell table:style-name="ce433" table:formula="of:=IF([.C199]&gt;[.$D$9];&quot;&quot;;[.$D$7]*[.G198])">
            <text:p/>
          </table:table-cell>
          <table:table-cell table:style-name="ce439" table:formula="of:=IF([.C199]&gt;[.$D$9];&quot;&quot;;[.D199]-[.E199])">
            <text:p/>
          </table:table-cell>
          <table:table-cell table:style-name="ce433" table:formula="of:=IF([.C199]&gt;[.$D$9];&quot;&quot;;[.G198]-[.F19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199]=[.$D$9];[.C199]=&quot;&quot;);&quot;&quot;;IF(ISNUMBER([.C199]);[.C199]+1;1))">
            <text:p/>
          </table:table-cell>
          <table:table-cell table:style-name="ce433" table:formula="of:=IF([.C200]&gt;[.$D$9];&quot;&quot;;PMT([.$D$7];[.$D$9];[.$D$3])*-1)">
            <text:p/>
          </table:table-cell>
          <table:table-cell table:style-name="ce433" table:formula="of:=IF([.C200]&gt;[.$D$9];&quot;&quot;;[.$D$7]*[.G199])">
            <text:p/>
          </table:table-cell>
          <table:table-cell table:style-name="ce439" table:formula="of:=IF([.C200]&gt;[.$D$9];&quot;&quot;;[.D200]-[.E200])">
            <text:p/>
          </table:table-cell>
          <table:table-cell table:style-name="ce433" table:formula="of:=IF([.C200]&gt;[.$D$9];&quot;&quot;;[.G199]-[.F20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0]=[.$D$9];[.C200]=&quot;&quot;);&quot;&quot;;IF(ISNUMBER([.C200]);[.C200]+1;1))">
            <text:p/>
          </table:table-cell>
          <table:table-cell table:style-name="ce433" table:formula="of:=IF([.C201]&gt;[.$D$9];&quot;&quot;;PMT([.$D$7];[.$D$9];[.$D$3])*-1)">
            <text:p/>
          </table:table-cell>
          <table:table-cell table:style-name="ce433" table:formula="of:=IF([.C201]&gt;[.$D$9];&quot;&quot;;[.$D$7]*[.G200])">
            <text:p/>
          </table:table-cell>
          <table:table-cell table:style-name="ce439" table:formula="of:=IF([.C201]&gt;[.$D$9];&quot;&quot;;[.D201]-[.E201])">
            <text:p/>
          </table:table-cell>
          <table:table-cell table:style-name="ce433" table:formula="of:=IF([.C201]&gt;[.$D$9];&quot;&quot;;[.G200]-[.F20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1]=[.$D$9];[.C201]=&quot;&quot;);&quot;&quot;;IF(ISNUMBER([.C201]);[.C201]+1;1))">
            <text:p/>
          </table:table-cell>
          <table:table-cell table:style-name="ce433" table:formula="of:=IF([.C202]&gt;[.$D$9];&quot;&quot;;PMT([.$D$7];[.$D$9];[.$D$3])*-1)">
            <text:p/>
          </table:table-cell>
          <table:table-cell table:style-name="ce433" table:formula="of:=IF([.C202]&gt;[.$D$9];&quot;&quot;;[.$D$7]*[.G201])">
            <text:p/>
          </table:table-cell>
          <table:table-cell table:style-name="ce439" table:formula="of:=IF([.C202]&gt;[.$D$9];&quot;&quot;;[.D202]-[.E202])">
            <text:p/>
          </table:table-cell>
          <table:table-cell table:style-name="ce433" table:formula="of:=IF([.C202]&gt;[.$D$9];&quot;&quot;;[.G201]-[.F20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2]=[.$D$9];[.C202]=&quot;&quot;);&quot;&quot;;IF(ISNUMBER([.C202]);[.C202]+1;1))">
            <text:p/>
          </table:table-cell>
          <table:table-cell table:style-name="ce433" table:formula="of:=IF([.C203]&gt;[.$D$9];&quot;&quot;;PMT([.$D$7];[.$D$9];[.$D$3])*-1)">
            <text:p/>
          </table:table-cell>
          <table:table-cell table:style-name="ce433" table:formula="of:=IF([.C203]&gt;[.$D$9];&quot;&quot;;[.$D$7]*[.G202])">
            <text:p/>
          </table:table-cell>
          <table:table-cell table:style-name="ce439" table:formula="of:=IF([.C203]&gt;[.$D$9];&quot;&quot;;[.D203]-[.E203])">
            <text:p/>
          </table:table-cell>
          <table:table-cell table:style-name="ce433" table:formula="of:=IF([.C203]&gt;[.$D$9];&quot;&quot;;[.G202]-[.F20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3]=[.$D$9];[.C203]=&quot;&quot;);&quot;&quot;;IF(ISNUMBER([.C203]);[.C203]+1;1))">
            <text:p/>
          </table:table-cell>
          <table:table-cell table:style-name="ce433" table:formula="of:=IF([.C204]&gt;[.$D$9];&quot;&quot;;PMT([.$D$7];[.$D$9];[.$D$3])*-1)">
            <text:p/>
          </table:table-cell>
          <table:table-cell table:style-name="ce433" table:formula="of:=IF([.C204]&gt;[.$D$9];&quot;&quot;;[.$D$7]*[.G203])">
            <text:p/>
          </table:table-cell>
          <table:table-cell table:style-name="ce439" table:formula="of:=IF([.C204]&gt;[.$D$9];&quot;&quot;;[.D204]-[.E204])">
            <text:p/>
          </table:table-cell>
          <table:table-cell table:style-name="ce433" table:formula="of:=IF([.C204]&gt;[.$D$9];&quot;&quot;;[.G203]-[.F20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4]=[.$D$9];[.C204]=&quot;&quot;);&quot;&quot;;IF(ISNUMBER([.C204]);[.C204]+1;1))">
            <text:p/>
          </table:table-cell>
          <table:table-cell table:style-name="ce433" table:formula="of:=IF([.C205]&gt;[.$D$9];&quot;&quot;;PMT([.$D$7];[.$D$9];[.$D$3])*-1)">
            <text:p/>
          </table:table-cell>
          <table:table-cell table:style-name="ce433" table:formula="of:=IF([.C205]&gt;[.$D$9];&quot;&quot;;[.$D$7]*[.G204])">
            <text:p/>
          </table:table-cell>
          <table:table-cell table:style-name="ce439" table:formula="of:=IF([.C205]&gt;[.$D$9];&quot;&quot;;[.D205]-[.E205])">
            <text:p/>
          </table:table-cell>
          <table:table-cell table:style-name="ce433" table:formula="of:=IF([.C205]&gt;[.$D$9];&quot;&quot;;[.G204]-[.F20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5]=[.$D$9];[.C205]=&quot;&quot;);&quot;&quot;;IF(ISNUMBER([.C205]);[.C205]+1;1))">
            <text:p/>
          </table:table-cell>
          <table:table-cell table:style-name="ce433" table:formula="of:=IF([.C206]&gt;[.$D$9];&quot;&quot;;PMT([.$D$7];[.$D$9];[.$D$3])*-1)">
            <text:p/>
          </table:table-cell>
          <table:table-cell table:style-name="ce433" table:formula="of:=IF([.C206]&gt;[.$D$9];&quot;&quot;;[.$D$7]*[.G205])">
            <text:p/>
          </table:table-cell>
          <table:table-cell table:style-name="ce439" table:formula="of:=IF([.C206]&gt;[.$D$9];&quot;&quot;;[.D206]-[.E206])">
            <text:p/>
          </table:table-cell>
          <table:table-cell table:style-name="ce433" table:formula="of:=IF([.C206]&gt;[.$D$9];&quot;&quot;;[.G205]-[.F20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6]=[.$D$9];[.C206]=&quot;&quot;);&quot;&quot;;IF(ISNUMBER([.C206]);[.C206]+1;1))">
            <text:p/>
          </table:table-cell>
          <table:table-cell table:style-name="ce433" table:formula="of:=IF([.C207]&gt;[.$D$9];&quot;&quot;;PMT([.$D$7];[.$D$9];[.$D$3])*-1)">
            <text:p/>
          </table:table-cell>
          <table:table-cell table:style-name="ce433" table:formula="of:=IF([.C207]&gt;[.$D$9];&quot;&quot;;[.$D$7]*[.G206])">
            <text:p/>
          </table:table-cell>
          <table:table-cell table:style-name="ce439" table:formula="of:=IF([.C207]&gt;[.$D$9];&quot;&quot;;[.D207]-[.E207])">
            <text:p/>
          </table:table-cell>
          <table:table-cell table:style-name="ce433" table:formula="of:=IF([.C207]&gt;[.$D$9];&quot;&quot;;[.G206]-[.F20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7]=[.$D$9];[.C207]=&quot;&quot;);&quot;&quot;;IF(ISNUMBER([.C207]);[.C207]+1;1))">
            <text:p/>
          </table:table-cell>
          <table:table-cell table:style-name="ce433" table:formula="of:=IF([.C208]&gt;[.$D$9];&quot;&quot;;PMT([.$D$7];[.$D$9];[.$D$3])*-1)">
            <text:p/>
          </table:table-cell>
          <table:table-cell table:style-name="ce433" table:formula="of:=IF([.C208]&gt;[.$D$9];&quot;&quot;;[.$D$7]*[.G207])">
            <text:p/>
          </table:table-cell>
          <table:table-cell table:style-name="ce439" table:formula="of:=IF([.C208]&gt;[.$D$9];&quot;&quot;;[.D208]-[.E208])">
            <text:p/>
          </table:table-cell>
          <table:table-cell table:style-name="ce433" table:formula="of:=IF([.C208]&gt;[.$D$9];&quot;&quot;;[.G207]-[.F20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8]=[.$D$9];[.C208]=&quot;&quot;);&quot;&quot;;IF(ISNUMBER([.C208]);[.C208]+1;1))">
            <text:p/>
          </table:table-cell>
          <table:table-cell table:style-name="ce433" table:formula="of:=IF([.C209]&gt;[.$D$9];&quot;&quot;;PMT([.$D$7];[.$D$9];[.$D$3])*-1)">
            <text:p/>
          </table:table-cell>
          <table:table-cell table:style-name="ce433" table:formula="of:=IF([.C209]&gt;[.$D$9];&quot;&quot;;[.$D$7]*[.G208])">
            <text:p/>
          </table:table-cell>
          <table:table-cell table:style-name="ce439" table:formula="of:=IF([.C209]&gt;[.$D$9];&quot;&quot;;[.D209]-[.E209])">
            <text:p/>
          </table:table-cell>
          <table:table-cell table:style-name="ce433" table:formula="of:=IF([.C209]&gt;[.$D$9];&quot;&quot;;[.G208]-[.F20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09]=[.$D$9];[.C209]=&quot;&quot;);&quot;&quot;;IF(ISNUMBER([.C209]);[.C209]+1;1))">
            <text:p/>
          </table:table-cell>
          <table:table-cell table:style-name="ce433" table:formula="of:=IF([.C210]&gt;[.$D$9];&quot;&quot;;PMT([.$D$7];[.$D$9];[.$D$3])*-1)">
            <text:p/>
          </table:table-cell>
          <table:table-cell table:style-name="ce433" table:formula="of:=IF([.C210]&gt;[.$D$9];&quot;&quot;;[.$D$7]*[.G209])">
            <text:p/>
          </table:table-cell>
          <table:table-cell table:style-name="ce439" table:formula="of:=IF([.C210]&gt;[.$D$9];&quot;&quot;;[.D210]-[.E210])">
            <text:p/>
          </table:table-cell>
          <table:table-cell table:style-name="ce433" table:formula="of:=IF([.C210]&gt;[.$D$9];&quot;&quot;;[.G209]-[.F21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0]=[.$D$9];[.C210]=&quot;&quot;);&quot;&quot;;IF(ISNUMBER([.C210]);[.C210]+1;1))">
            <text:p/>
          </table:table-cell>
          <table:table-cell table:style-name="ce433" table:formula="of:=IF([.C211]&gt;[.$D$9];&quot;&quot;;PMT([.$D$7];[.$D$9];[.$D$3])*-1)">
            <text:p/>
          </table:table-cell>
          <table:table-cell table:style-name="ce433" table:formula="of:=IF([.C211]&gt;[.$D$9];&quot;&quot;;[.$D$7]*[.G210])">
            <text:p/>
          </table:table-cell>
          <table:table-cell table:style-name="ce439" table:formula="of:=IF([.C211]&gt;[.$D$9];&quot;&quot;;[.D211]-[.E211])">
            <text:p/>
          </table:table-cell>
          <table:table-cell table:style-name="ce433" table:formula="of:=IF([.C211]&gt;[.$D$9];&quot;&quot;;[.G210]-[.F21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1]=[.$D$9];[.C211]=&quot;&quot;);&quot;&quot;;IF(ISNUMBER([.C211]);[.C211]+1;1))">
            <text:p/>
          </table:table-cell>
          <table:table-cell table:style-name="ce433" table:formula="of:=IF([.C212]&gt;[.$D$9];&quot;&quot;;PMT([.$D$7];[.$D$9];[.$D$3])*-1)">
            <text:p/>
          </table:table-cell>
          <table:table-cell table:style-name="ce433" table:formula="of:=IF([.C212]&gt;[.$D$9];&quot;&quot;;[.$D$7]*[.G211])">
            <text:p/>
          </table:table-cell>
          <table:table-cell table:style-name="ce439" table:formula="of:=IF([.C212]&gt;[.$D$9];&quot;&quot;;[.D212]-[.E212])">
            <text:p/>
          </table:table-cell>
          <table:table-cell table:style-name="ce433" table:formula="of:=IF([.C212]&gt;[.$D$9];&quot;&quot;;[.G211]-[.F21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2]=[.$D$9];[.C212]=&quot;&quot;);&quot;&quot;;IF(ISNUMBER([.C212]);[.C212]+1;1))">
            <text:p/>
          </table:table-cell>
          <table:table-cell table:style-name="ce433" table:formula="of:=IF([.C213]&gt;[.$D$9];&quot;&quot;;PMT([.$D$7];[.$D$9];[.$D$3])*-1)">
            <text:p/>
          </table:table-cell>
          <table:table-cell table:style-name="ce433" table:formula="of:=IF([.C213]&gt;[.$D$9];&quot;&quot;;[.$D$7]*[.G212])">
            <text:p/>
          </table:table-cell>
          <table:table-cell table:style-name="ce439" table:formula="of:=IF([.C213]&gt;[.$D$9];&quot;&quot;;[.D213]-[.E213])">
            <text:p/>
          </table:table-cell>
          <table:table-cell table:style-name="ce433" table:formula="of:=IF([.C213]&gt;[.$D$9];&quot;&quot;;[.G212]-[.F21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3]=[.$D$9];[.C213]=&quot;&quot;);&quot;&quot;;IF(ISNUMBER([.C213]);[.C213]+1;1))">
            <text:p/>
          </table:table-cell>
          <table:table-cell table:style-name="ce433" table:formula="of:=IF([.C214]&gt;[.$D$9];&quot;&quot;;PMT([.$D$7];[.$D$9];[.$D$3])*-1)">
            <text:p/>
          </table:table-cell>
          <table:table-cell table:style-name="ce433" table:formula="of:=IF([.C214]&gt;[.$D$9];&quot;&quot;;[.$D$7]*[.G213])">
            <text:p/>
          </table:table-cell>
          <table:table-cell table:style-name="ce439" table:formula="of:=IF([.C214]&gt;[.$D$9];&quot;&quot;;[.D214]-[.E214])">
            <text:p/>
          </table:table-cell>
          <table:table-cell table:style-name="ce433" table:formula="of:=IF([.C214]&gt;[.$D$9];&quot;&quot;;[.G213]-[.F21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4]=[.$D$9];[.C214]=&quot;&quot;);&quot;&quot;;IF(ISNUMBER([.C214]);[.C214]+1;1))">
            <text:p/>
          </table:table-cell>
          <table:table-cell table:style-name="ce433" table:formula="of:=IF([.C215]&gt;[.$D$9];&quot;&quot;;PMT([.$D$7];[.$D$9];[.$D$3])*-1)">
            <text:p/>
          </table:table-cell>
          <table:table-cell table:style-name="ce433" table:formula="of:=IF([.C215]&gt;[.$D$9];&quot;&quot;;[.$D$7]*[.G214])">
            <text:p/>
          </table:table-cell>
          <table:table-cell table:style-name="ce439" table:formula="of:=IF([.C215]&gt;[.$D$9];&quot;&quot;;[.D215]-[.E215])">
            <text:p/>
          </table:table-cell>
          <table:table-cell table:style-name="ce433" table:formula="of:=IF([.C215]&gt;[.$D$9];&quot;&quot;;[.G214]-[.F21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5]=[.$D$9];[.C215]=&quot;&quot;);&quot;&quot;;IF(ISNUMBER([.C215]);[.C215]+1;1))">
            <text:p/>
          </table:table-cell>
          <table:table-cell table:style-name="ce433" table:formula="of:=IF([.C216]&gt;[.$D$9];&quot;&quot;;PMT([.$D$7];[.$D$9];[.$D$3])*-1)">
            <text:p/>
          </table:table-cell>
          <table:table-cell table:style-name="ce433" table:formula="of:=IF([.C216]&gt;[.$D$9];&quot;&quot;;[.$D$7]*[.G215])">
            <text:p/>
          </table:table-cell>
          <table:table-cell table:style-name="ce439" table:formula="of:=IF([.C216]&gt;[.$D$9];&quot;&quot;;[.D216]-[.E216])">
            <text:p/>
          </table:table-cell>
          <table:table-cell table:style-name="ce433" table:formula="of:=IF([.C216]&gt;[.$D$9];&quot;&quot;;[.G215]-[.F21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6]=[.$D$9];[.C216]=&quot;&quot;);&quot;&quot;;IF(ISNUMBER([.C216]);[.C216]+1;1))">
            <text:p/>
          </table:table-cell>
          <table:table-cell table:style-name="ce433" table:formula="of:=IF([.C217]&gt;[.$D$9];&quot;&quot;;PMT([.$D$7];[.$D$9];[.$D$3])*-1)">
            <text:p/>
          </table:table-cell>
          <table:table-cell table:style-name="ce433" table:formula="of:=IF([.C217]&gt;[.$D$9];&quot;&quot;;[.$D$7]*[.G216])">
            <text:p/>
          </table:table-cell>
          <table:table-cell table:style-name="ce439" table:formula="of:=IF([.C217]&gt;[.$D$9];&quot;&quot;;[.D217]-[.E217])">
            <text:p/>
          </table:table-cell>
          <table:table-cell table:style-name="ce433" table:formula="of:=IF([.C217]&gt;[.$D$9];&quot;&quot;;[.G216]-[.F21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7]=[.$D$9];[.C217]=&quot;&quot;);&quot;&quot;;IF(ISNUMBER([.C217]);[.C217]+1;1))">
            <text:p/>
          </table:table-cell>
          <table:table-cell table:style-name="ce433" table:formula="of:=IF([.C218]&gt;[.$D$9];&quot;&quot;;PMT([.$D$7];[.$D$9];[.$D$3])*-1)">
            <text:p/>
          </table:table-cell>
          <table:table-cell table:style-name="ce433" table:formula="of:=IF([.C218]&gt;[.$D$9];&quot;&quot;;[.$D$7]*[.G217])">
            <text:p/>
          </table:table-cell>
          <table:table-cell table:style-name="ce439" table:formula="of:=IF([.C218]&gt;[.$D$9];&quot;&quot;;[.D218]-[.E218])">
            <text:p/>
          </table:table-cell>
          <table:table-cell table:style-name="ce433" table:formula="of:=IF([.C218]&gt;[.$D$9];&quot;&quot;;[.G217]-[.F21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8]=[.$D$9];[.C218]=&quot;&quot;);&quot;&quot;;IF(ISNUMBER([.C218]);[.C218]+1;1))">
            <text:p/>
          </table:table-cell>
          <table:table-cell table:style-name="ce433" table:formula="of:=IF([.C219]&gt;[.$D$9];&quot;&quot;;PMT([.$D$7];[.$D$9];[.$D$3])*-1)">
            <text:p/>
          </table:table-cell>
          <table:table-cell table:style-name="ce433" table:formula="of:=IF([.C219]&gt;[.$D$9];&quot;&quot;;[.$D$7]*[.G218])">
            <text:p/>
          </table:table-cell>
          <table:table-cell table:style-name="ce439" table:formula="of:=IF([.C219]&gt;[.$D$9];&quot;&quot;;[.D219]-[.E219])">
            <text:p/>
          </table:table-cell>
          <table:table-cell table:style-name="ce433" table:formula="of:=IF([.C219]&gt;[.$D$9];&quot;&quot;;[.G218]-[.F21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19]=[.$D$9];[.C219]=&quot;&quot;);&quot;&quot;;IF(ISNUMBER([.C219]);[.C219]+1;1))">
            <text:p/>
          </table:table-cell>
          <table:table-cell table:style-name="ce433" table:formula="of:=IF([.C220]&gt;[.$D$9];&quot;&quot;;PMT([.$D$7];[.$D$9];[.$D$3])*-1)">
            <text:p/>
          </table:table-cell>
          <table:table-cell table:style-name="ce433" table:formula="of:=IF([.C220]&gt;[.$D$9];&quot;&quot;;[.$D$7]*[.G219])">
            <text:p/>
          </table:table-cell>
          <table:table-cell table:style-name="ce439" table:formula="of:=IF([.C220]&gt;[.$D$9];&quot;&quot;;[.D220]-[.E220])">
            <text:p/>
          </table:table-cell>
          <table:table-cell table:style-name="ce433" table:formula="of:=IF([.C220]&gt;[.$D$9];&quot;&quot;;[.G219]-[.F22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0]=[.$D$9];[.C220]=&quot;&quot;);&quot;&quot;;IF(ISNUMBER([.C220]);[.C220]+1;1))">
            <text:p/>
          </table:table-cell>
          <table:table-cell table:style-name="ce433" table:formula="of:=IF([.C221]&gt;[.$D$9];&quot;&quot;;PMT([.$D$7];[.$D$9];[.$D$3])*-1)">
            <text:p/>
          </table:table-cell>
          <table:table-cell table:style-name="ce433" table:formula="of:=IF([.C221]&gt;[.$D$9];&quot;&quot;;[.$D$7]*[.G220])">
            <text:p/>
          </table:table-cell>
          <table:table-cell table:style-name="ce439" table:formula="of:=IF([.C221]&gt;[.$D$9];&quot;&quot;;[.D221]-[.E221])">
            <text:p/>
          </table:table-cell>
          <table:table-cell table:style-name="ce433" table:formula="of:=IF([.C221]&gt;[.$D$9];&quot;&quot;;[.G220]-[.F22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1]=[.$D$9];[.C221]=&quot;&quot;);&quot;&quot;;IF(ISNUMBER([.C221]);[.C221]+1;1))">
            <text:p/>
          </table:table-cell>
          <table:table-cell table:style-name="ce433" table:formula="of:=IF([.C222]&gt;[.$D$9];&quot;&quot;;PMT([.$D$7];[.$D$9];[.$D$3])*-1)">
            <text:p/>
          </table:table-cell>
          <table:table-cell table:style-name="ce433" table:formula="of:=IF([.C222]&gt;[.$D$9];&quot;&quot;;[.$D$7]*[.G221])">
            <text:p/>
          </table:table-cell>
          <table:table-cell table:style-name="ce439" table:formula="of:=IF([.C222]&gt;[.$D$9];&quot;&quot;;[.D222]-[.E222])">
            <text:p/>
          </table:table-cell>
          <table:table-cell table:style-name="ce433" table:formula="of:=IF([.C222]&gt;[.$D$9];&quot;&quot;;[.G221]-[.F22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2]=[.$D$9];[.C222]=&quot;&quot;);&quot;&quot;;IF(ISNUMBER([.C222]);[.C222]+1;1))">
            <text:p/>
          </table:table-cell>
          <table:table-cell table:style-name="ce433" table:formula="of:=IF([.C223]&gt;[.$D$9];&quot;&quot;;PMT([.$D$7];[.$D$9];[.$D$3])*-1)">
            <text:p/>
          </table:table-cell>
          <table:table-cell table:style-name="ce433" table:formula="of:=IF([.C223]&gt;[.$D$9];&quot;&quot;;[.$D$7]*[.G222])">
            <text:p/>
          </table:table-cell>
          <table:table-cell table:style-name="ce439" table:formula="of:=IF([.C223]&gt;[.$D$9];&quot;&quot;;[.D223]-[.E223])">
            <text:p/>
          </table:table-cell>
          <table:table-cell table:style-name="ce433" table:formula="of:=IF([.C223]&gt;[.$D$9];&quot;&quot;;[.G222]-[.F22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3]=[.$D$9];[.C223]=&quot;&quot;);&quot;&quot;;IF(ISNUMBER([.C223]);[.C223]+1;1))">
            <text:p/>
          </table:table-cell>
          <table:table-cell table:style-name="ce433" table:formula="of:=IF([.C224]&gt;[.$D$9];&quot;&quot;;PMT([.$D$7];[.$D$9];[.$D$3])*-1)">
            <text:p/>
          </table:table-cell>
          <table:table-cell table:style-name="ce433" table:formula="of:=IF([.C224]&gt;[.$D$9];&quot;&quot;;[.$D$7]*[.G223])">
            <text:p/>
          </table:table-cell>
          <table:table-cell table:style-name="ce439" table:formula="of:=IF([.C224]&gt;[.$D$9];&quot;&quot;;[.D224]-[.E224])">
            <text:p/>
          </table:table-cell>
          <table:table-cell table:style-name="ce433" table:formula="of:=IF([.C224]&gt;[.$D$9];&quot;&quot;;[.G223]-[.F22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4]=[.$D$9];[.C224]=&quot;&quot;);&quot;&quot;;IF(ISNUMBER([.C224]);[.C224]+1;1))">
            <text:p/>
          </table:table-cell>
          <table:table-cell table:style-name="ce433" table:formula="of:=IF([.C225]&gt;[.$D$9];&quot;&quot;;PMT([.$D$7];[.$D$9];[.$D$3])*-1)">
            <text:p/>
          </table:table-cell>
          <table:table-cell table:style-name="ce433" table:formula="of:=IF([.C225]&gt;[.$D$9];&quot;&quot;;[.$D$7]*[.G224])">
            <text:p/>
          </table:table-cell>
          <table:table-cell table:style-name="ce439" table:formula="of:=IF([.C225]&gt;[.$D$9];&quot;&quot;;[.D225]-[.E225])">
            <text:p/>
          </table:table-cell>
          <table:table-cell table:style-name="ce433" table:formula="of:=IF([.C225]&gt;[.$D$9];&quot;&quot;;[.G224]-[.F22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5]=[.$D$9];[.C225]=&quot;&quot;);&quot;&quot;;IF(ISNUMBER([.C225]);[.C225]+1;1))">
            <text:p/>
          </table:table-cell>
          <table:table-cell table:style-name="ce433" table:formula="of:=IF([.C226]&gt;[.$D$9];&quot;&quot;;PMT([.$D$7];[.$D$9];[.$D$3])*-1)">
            <text:p/>
          </table:table-cell>
          <table:table-cell table:style-name="ce433" table:formula="of:=IF([.C226]&gt;[.$D$9];&quot;&quot;;[.$D$7]*[.G225])">
            <text:p/>
          </table:table-cell>
          <table:table-cell table:style-name="ce439" table:formula="of:=IF([.C226]&gt;[.$D$9];&quot;&quot;;[.D226]-[.E226])">
            <text:p/>
          </table:table-cell>
          <table:table-cell table:style-name="ce433" table:formula="of:=IF([.C226]&gt;[.$D$9];&quot;&quot;;[.G225]-[.F22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6]=[.$D$9];[.C226]=&quot;&quot;);&quot;&quot;;IF(ISNUMBER([.C226]);[.C226]+1;1))">
            <text:p/>
          </table:table-cell>
          <table:table-cell table:style-name="ce433" table:formula="of:=IF([.C227]&gt;[.$D$9];&quot;&quot;;PMT([.$D$7];[.$D$9];[.$D$3])*-1)">
            <text:p/>
          </table:table-cell>
          <table:table-cell table:style-name="ce433" table:formula="of:=IF([.C227]&gt;[.$D$9];&quot;&quot;;[.$D$7]*[.G226])">
            <text:p/>
          </table:table-cell>
          <table:table-cell table:style-name="ce439" table:formula="of:=IF([.C227]&gt;[.$D$9];&quot;&quot;;[.D227]-[.E227])">
            <text:p/>
          </table:table-cell>
          <table:table-cell table:style-name="ce433" table:formula="of:=IF([.C227]&gt;[.$D$9];&quot;&quot;;[.G226]-[.F22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7]=[.$D$9];[.C227]=&quot;&quot;);&quot;&quot;;IF(ISNUMBER([.C227]);[.C227]+1;1))">
            <text:p/>
          </table:table-cell>
          <table:table-cell table:style-name="ce433" table:formula="of:=IF([.C228]&gt;[.$D$9];&quot;&quot;;PMT([.$D$7];[.$D$9];[.$D$3])*-1)">
            <text:p/>
          </table:table-cell>
          <table:table-cell table:style-name="ce433" table:formula="of:=IF([.C228]&gt;[.$D$9];&quot;&quot;;[.$D$7]*[.G227])">
            <text:p/>
          </table:table-cell>
          <table:table-cell table:style-name="ce439" table:formula="of:=IF([.C228]&gt;[.$D$9];&quot;&quot;;[.D228]-[.E228])">
            <text:p/>
          </table:table-cell>
          <table:table-cell table:style-name="ce433" table:formula="of:=IF([.C228]&gt;[.$D$9];&quot;&quot;;[.G227]-[.F22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8]=[.$D$9];[.C228]=&quot;&quot;);&quot;&quot;;IF(ISNUMBER([.C228]);[.C228]+1;1))">
            <text:p/>
          </table:table-cell>
          <table:table-cell table:style-name="ce433" table:formula="of:=IF([.C229]&gt;[.$D$9];&quot;&quot;;PMT([.$D$7];[.$D$9];[.$D$3])*-1)">
            <text:p/>
          </table:table-cell>
          <table:table-cell table:style-name="ce433" table:formula="of:=IF([.C229]&gt;[.$D$9];&quot;&quot;;[.$D$7]*[.G228])">
            <text:p/>
          </table:table-cell>
          <table:table-cell table:style-name="ce439" table:formula="of:=IF([.C229]&gt;[.$D$9];&quot;&quot;;[.D229]-[.E229])">
            <text:p/>
          </table:table-cell>
          <table:table-cell table:style-name="ce433" table:formula="of:=IF([.C229]&gt;[.$D$9];&quot;&quot;;[.G228]-[.F22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29]=[.$D$9];[.C229]=&quot;&quot;);&quot;&quot;;IF(ISNUMBER([.C229]);[.C229]+1;1))">
            <text:p/>
          </table:table-cell>
          <table:table-cell table:style-name="ce433" table:formula="of:=IF([.C230]&gt;[.$D$9];&quot;&quot;;PMT([.$D$7];[.$D$9];[.$D$3])*-1)">
            <text:p/>
          </table:table-cell>
          <table:table-cell table:style-name="ce433" table:formula="of:=IF([.C230]&gt;[.$D$9];&quot;&quot;;[.$D$7]*[.G229])">
            <text:p/>
          </table:table-cell>
          <table:table-cell table:style-name="ce439" table:formula="of:=IF([.C230]&gt;[.$D$9];&quot;&quot;;[.D230]-[.E230])">
            <text:p/>
          </table:table-cell>
          <table:table-cell table:style-name="ce433" table:formula="of:=IF([.C230]&gt;[.$D$9];&quot;&quot;;[.G229]-[.F23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0]=[.$D$9];[.C230]=&quot;&quot;);&quot;&quot;;IF(ISNUMBER([.C230]);[.C230]+1;1))">
            <text:p/>
          </table:table-cell>
          <table:table-cell table:style-name="ce433" table:formula="of:=IF([.C231]&gt;[.$D$9];&quot;&quot;;PMT([.$D$7];[.$D$9];[.$D$3])*-1)">
            <text:p/>
          </table:table-cell>
          <table:table-cell table:style-name="ce433" table:formula="of:=IF([.C231]&gt;[.$D$9];&quot;&quot;;[.$D$7]*[.G230])">
            <text:p/>
          </table:table-cell>
          <table:table-cell table:style-name="ce439" table:formula="of:=IF([.C231]&gt;[.$D$9];&quot;&quot;;[.D231]-[.E231])">
            <text:p/>
          </table:table-cell>
          <table:table-cell table:style-name="ce433" table:formula="of:=IF([.C231]&gt;[.$D$9];&quot;&quot;;[.G230]-[.F23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1]=[.$D$9];[.C231]=&quot;&quot;);&quot;&quot;;IF(ISNUMBER([.C231]);[.C231]+1;1))">
            <text:p/>
          </table:table-cell>
          <table:table-cell table:style-name="ce433" table:formula="of:=IF([.C232]&gt;[.$D$9];&quot;&quot;;PMT([.$D$7];[.$D$9];[.$D$3])*-1)">
            <text:p/>
          </table:table-cell>
          <table:table-cell table:style-name="ce433" table:formula="of:=IF([.C232]&gt;[.$D$9];&quot;&quot;;[.$D$7]*[.G231])">
            <text:p/>
          </table:table-cell>
          <table:table-cell table:style-name="ce439" table:formula="of:=IF([.C232]&gt;[.$D$9];&quot;&quot;;[.D232]-[.E232])">
            <text:p/>
          </table:table-cell>
          <table:table-cell table:style-name="ce433" table:formula="of:=IF([.C232]&gt;[.$D$9];&quot;&quot;;[.G231]-[.F23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2]=[.$D$9];[.C232]=&quot;&quot;);&quot;&quot;;IF(ISNUMBER([.C232]);[.C232]+1;1))">
            <text:p/>
          </table:table-cell>
          <table:table-cell table:style-name="ce433" table:formula="of:=IF([.C233]&gt;[.$D$9];&quot;&quot;;PMT([.$D$7];[.$D$9];[.$D$3])*-1)">
            <text:p/>
          </table:table-cell>
          <table:table-cell table:style-name="ce433" table:formula="of:=IF([.C233]&gt;[.$D$9];&quot;&quot;;[.$D$7]*[.G232])">
            <text:p/>
          </table:table-cell>
          <table:table-cell table:style-name="ce439" table:formula="of:=IF([.C233]&gt;[.$D$9];&quot;&quot;;[.D233]-[.E233])">
            <text:p/>
          </table:table-cell>
          <table:table-cell table:style-name="ce433" table:formula="of:=IF([.C233]&gt;[.$D$9];&quot;&quot;;[.G232]-[.F23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3]=[.$D$9];[.C233]=&quot;&quot;);&quot;&quot;;IF(ISNUMBER([.C233]);[.C233]+1;1))">
            <text:p/>
          </table:table-cell>
          <table:table-cell table:style-name="ce433" table:formula="of:=IF([.C234]&gt;[.$D$9];&quot;&quot;;PMT([.$D$7];[.$D$9];[.$D$3])*-1)">
            <text:p/>
          </table:table-cell>
          <table:table-cell table:style-name="ce433" table:formula="of:=IF([.C234]&gt;[.$D$9];&quot;&quot;;[.$D$7]*[.G233])">
            <text:p/>
          </table:table-cell>
          <table:table-cell table:style-name="ce439" table:formula="of:=IF([.C234]&gt;[.$D$9];&quot;&quot;;[.D234]-[.E234])">
            <text:p/>
          </table:table-cell>
          <table:table-cell table:style-name="ce433" table:formula="of:=IF([.C234]&gt;[.$D$9];&quot;&quot;;[.G233]-[.F23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4]=[.$D$9];[.C234]=&quot;&quot;);&quot;&quot;;IF(ISNUMBER([.C234]);[.C234]+1;1))">
            <text:p/>
          </table:table-cell>
          <table:table-cell table:style-name="ce433" table:formula="of:=IF([.C235]&gt;[.$D$9];&quot;&quot;;PMT([.$D$7];[.$D$9];[.$D$3])*-1)">
            <text:p/>
          </table:table-cell>
          <table:table-cell table:style-name="ce433" table:formula="of:=IF([.C235]&gt;[.$D$9];&quot;&quot;;[.$D$7]*[.G234])">
            <text:p/>
          </table:table-cell>
          <table:table-cell table:style-name="ce439" table:formula="of:=IF([.C235]&gt;[.$D$9];&quot;&quot;;[.D235]-[.E235])">
            <text:p/>
          </table:table-cell>
          <table:table-cell table:style-name="ce433" table:formula="of:=IF([.C235]&gt;[.$D$9];&quot;&quot;;[.G234]-[.F23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5]=[.$D$9];[.C235]=&quot;&quot;);&quot;&quot;;IF(ISNUMBER([.C235]);[.C235]+1;1))">
            <text:p/>
          </table:table-cell>
          <table:table-cell table:style-name="ce433" table:formula="of:=IF([.C236]&gt;[.$D$9];&quot;&quot;;PMT([.$D$7];[.$D$9];[.$D$3])*-1)">
            <text:p/>
          </table:table-cell>
          <table:table-cell table:style-name="ce433" table:formula="of:=IF([.C236]&gt;[.$D$9];&quot;&quot;;[.$D$7]*[.G235])">
            <text:p/>
          </table:table-cell>
          <table:table-cell table:style-name="ce439" table:formula="of:=IF([.C236]&gt;[.$D$9];&quot;&quot;;[.D236]-[.E236])">
            <text:p/>
          </table:table-cell>
          <table:table-cell table:style-name="ce433" table:formula="of:=IF([.C236]&gt;[.$D$9];&quot;&quot;;[.G235]-[.F23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6]=[.$D$9];[.C236]=&quot;&quot;);&quot;&quot;;IF(ISNUMBER([.C236]);[.C236]+1;1))">
            <text:p/>
          </table:table-cell>
          <table:table-cell table:style-name="ce433" table:formula="of:=IF([.C237]&gt;[.$D$9];&quot;&quot;;PMT([.$D$7];[.$D$9];[.$D$3])*-1)">
            <text:p/>
          </table:table-cell>
          <table:table-cell table:style-name="ce433" table:formula="of:=IF([.C237]&gt;[.$D$9];&quot;&quot;;[.$D$7]*[.G236])">
            <text:p/>
          </table:table-cell>
          <table:table-cell table:style-name="ce439" table:formula="of:=IF([.C237]&gt;[.$D$9];&quot;&quot;;[.D237]-[.E237])">
            <text:p/>
          </table:table-cell>
          <table:table-cell table:style-name="ce433" table:formula="of:=IF([.C237]&gt;[.$D$9];&quot;&quot;;[.G236]-[.F23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7]=[.$D$9];[.C237]=&quot;&quot;);&quot;&quot;;IF(ISNUMBER([.C237]);[.C237]+1;1))">
            <text:p/>
          </table:table-cell>
          <table:table-cell table:style-name="ce433" table:formula="of:=IF([.C238]&gt;[.$D$9];&quot;&quot;;PMT([.$D$7];[.$D$9];[.$D$3])*-1)">
            <text:p/>
          </table:table-cell>
          <table:table-cell table:style-name="ce433" table:formula="of:=IF([.C238]&gt;[.$D$9];&quot;&quot;;[.$D$7]*[.G237])">
            <text:p/>
          </table:table-cell>
          <table:table-cell table:style-name="ce439" table:formula="of:=IF([.C238]&gt;[.$D$9];&quot;&quot;;[.D238]-[.E238])">
            <text:p/>
          </table:table-cell>
          <table:table-cell table:style-name="ce433" table:formula="of:=IF([.C238]&gt;[.$D$9];&quot;&quot;;[.G237]-[.F23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8]=[.$D$9];[.C238]=&quot;&quot;);&quot;&quot;;IF(ISNUMBER([.C238]);[.C238]+1;1))">
            <text:p/>
          </table:table-cell>
          <table:table-cell table:style-name="ce433" table:formula="of:=IF([.C239]&gt;[.$D$9];&quot;&quot;;PMT([.$D$7];[.$D$9];[.$D$3])*-1)">
            <text:p/>
          </table:table-cell>
          <table:table-cell table:style-name="ce433" table:formula="of:=IF([.C239]&gt;[.$D$9];&quot;&quot;;[.$D$7]*[.G238])">
            <text:p/>
          </table:table-cell>
          <table:table-cell table:style-name="ce439" table:formula="of:=IF([.C239]&gt;[.$D$9];&quot;&quot;;[.D239]-[.E239])">
            <text:p/>
          </table:table-cell>
          <table:table-cell table:style-name="ce433" table:formula="of:=IF([.C239]&gt;[.$D$9];&quot;&quot;;[.G238]-[.F23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39]=[.$D$9];[.C239]=&quot;&quot;);&quot;&quot;;IF(ISNUMBER([.C239]);[.C239]+1;1))">
            <text:p/>
          </table:table-cell>
          <table:table-cell table:style-name="ce433" table:formula="of:=IF([.C240]&gt;[.$D$9];&quot;&quot;;PMT([.$D$7];[.$D$9];[.$D$3])*-1)">
            <text:p/>
          </table:table-cell>
          <table:table-cell table:style-name="ce433" table:formula="of:=IF([.C240]&gt;[.$D$9];&quot;&quot;;[.$D$7]*[.G239])">
            <text:p/>
          </table:table-cell>
          <table:table-cell table:style-name="ce439" table:formula="of:=IF([.C240]&gt;[.$D$9];&quot;&quot;;[.D240]-[.E240])">
            <text:p/>
          </table:table-cell>
          <table:table-cell table:style-name="ce433" table:formula="of:=IF([.C240]&gt;[.$D$9];&quot;&quot;;[.G239]-[.F24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0]=[.$D$9];[.C240]=&quot;&quot;);&quot;&quot;;IF(ISNUMBER([.C240]);[.C240]+1;1))">
            <text:p/>
          </table:table-cell>
          <table:table-cell table:style-name="ce433" table:formula="of:=IF([.C241]&gt;[.$D$9];&quot;&quot;;PMT([.$D$7];[.$D$9];[.$D$3])*-1)">
            <text:p/>
          </table:table-cell>
          <table:table-cell table:style-name="ce433" table:formula="of:=IF([.C241]&gt;[.$D$9];&quot;&quot;;[.$D$7]*[.G240])">
            <text:p/>
          </table:table-cell>
          <table:table-cell table:style-name="ce439" table:formula="of:=IF([.C241]&gt;[.$D$9];&quot;&quot;;[.D241]-[.E241])">
            <text:p/>
          </table:table-cell>
          <table:table-cell table:style-name="ce433" table:formula="of:=IF([.C241]&gt;[.$D$9];&quot;&quot;;[.G240]-[.F24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1]=[.$D$9];[.C241]=&quot;&quot;);&quot;&quot;;IF(ISNUMBER([.C241]);[.C241]+1;1))">
            <text:p/>
          </table:table-cell>
          <table:table-cell table:style-name="ce433" table:formula="of:=IF([.C242]&gt;[.$D$9];&quot;&quot;;PMT([.$D$7];[.$D$9];[.$D$3])*-1)">
            <text:p/>
          </table:table-cell>
          <table:table-cell table:style-name="ce433" table:formula="of:=IF([.C242]&gt;[.$D$9];&quot;&quot;;[.$D$7]*[.G241])">
            <text:p/>
          </table:table-cell>
          <table:table-cell table:style-name="ce439" table:formula="of:=IF([.C242]&gt;[.$D$9];&quot;&quot;;[.D242]-[.E242])">
            <text:p/>
          </table:table-cell>
          <table:table-cell table:style-name="ce433" table:formula="of:=IF([.C242]&gt;[.$D$9];&quot;&quot;;[.G241]-[.F24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2]=[.$D$9];[.C242]=&quot;&quot;);&quot;&quot;;IF(ISNUMBER([.C242]);[.C242]+1;1))">
            <text:p/>
          </table:table-cell>
          <table:table-cell table:style-name="ce433" table:formula="of:=IF([.C243]&gt;[.$D$9];&quot;&quot;;PMT([.$D$7];[.$D$9];[.$D$3])*-1)">
            <text:p/>
          </table:table-cell>
          <table:table-cell table:style-name="ce433" table:formula="of:=IF([.C243]&gt;[.$D$9];&quot;&quot;;[.$D$7]*[.G242])">
            <text:p/>
          </table:table-cell>
          <table:table-cell table:style-name="ce439" table:formula="of:=IF([.C243]&gt;[.$D$9];&quot;&quot;;[.D243]-[.E243])">
            <text:p/>
          </table:table-cell>
          <table:table-cell table:style-name="ce433" table:formula="of:=IF([.C243]&gt;[.$D$9];&quot;&quot;;[.G242]-[.F24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3]=[.$D$9];[.C243]=&quot;&quot;);&quot;&quot;;IF(ISNUMBER([.C243]);[.C243]+1;1))">
            <text:p/>
          </table:table-cell>
          <table:table-cell table:style-name="ce433" table:formula="of:=IF([.C244]&gt;[.$D$9];&quot;&quot;;PMT([.$D$7];[.$D$9];[.$D$3])*-1)">
            <text:p/>
          </table:table-cell>
          <table:table-cell table:style-name="ce433" table:formula="of:=IF([.C244]&gt;[.$D$9];&quot;&quot;;[.$D$7]*[.G243])">
            <text:p/>
          </table:table-cell>
          <table:table-cell table:style-name="ce439" table:formula="of:=IF([.C244]&gt;[.$D$9];&quot;&quot;;[.D244]-[.E244])">
            <text:p/>
          </table:table-cell>
          <table:table-cell table:style-name="ce433" table:formula="of:=IF([.C244]&gt;[.$D$9];&quot;&quot;;[.G243]-[.F24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4]=[.$D$9];[.C244]=&quot;&quot;);&quot;&quot;;IF(ISNUMBER([.C244]);[.C244]+1;1))">
            <text:p/>
          </table:table-cell>
          <table:table-cell table:style-name="ce433" table:formula="of:=IF([.C245]&gt;[.$D$9];&quot;&quot;;PMT([.$D$7];[.$D$9];[.$D$3])*-1)">
            <text:p/>
          </table:table-cell>
          <table:table-cell table:style-name="ce433" table:formula="of:=IF([.C245]&gt;[.$D$9];&quot;&quot;;[.$D$7]*[.G244])">
            <text:p/>
          </table:table-cell>
          <table:table-cell table:style-name="ce439" table:formula="of:=IF([.C245]&gt;[.$D$9];&quot;&quot;;[.D245]-[.E245])">
            <text:p/>
          </table:table-cell>
          <table:table-cell table:style-name="ce433" table:formula="of:=IF([.C245]&gt;[.$D$9];&quot;&quot;;[.G244]-[.F24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5]=[.$D$9];[.C245]=&quot;&quot;);&quot;&quot;;IF(ISNUMBER([.C245]);[.C245]+1;1))">
            <text:p/>
          </table:table-cell>
          <table:table-cell table:style-name="ce433" table:formula="of:=IF([.C246]&gt;[.$D$9];&quot;&quot;;PMT([.$D$7];[.$D$9];[.$D$3])*-1)">
            <text:p/>
          </table:table-cell>
          <table:table-cell table:style-name="ce433" table:formula="of:=IF([.C246]&gt;[.$D$9];&quot;&quot;;[.$D$7]*[.G245])">
            <text:p/>
          </table:table-cell>
          <table:table-cell table:style-name="ce439" table:formula="of:=IF([.C246]&gt;[.$D$9];&quot;&quot;;[.D246]-[.E246])">
            <text:p/>
          </table:table-cell>
          <table:table-cell table:style-name="ce433" table:formula="of:=IF([.C246]&gt;[.$D$9];&quot;&quot;;[.G245]-[.F24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6]=[.$D$9];[.C246]=&quot;&quot;);&quot;&quot;;IF(ISNUMBER([.C246]);[.C246]+1;1))">
            <text:p/>
          </table:table-cell>
          <table:table-cell table:style-name="ce433" table:formula="of:=IF([.C247]&gt;[.$D$9];&quot;&quot;;PMT([.$D$7];[.$D$9];[.$D$3])*-1)">
            <text:p/>
          </table:table-cell>
          <table:table-cell table:style-name="ce433" table:formula="of:=IF([.C247]&gt;[.$D$9];&quot;&quot;;[.$D$7]*[.G246])">
            <text:p/>
          </table:table-cell>
          <table:table-cell table:style-name="ce439" table:formula="of:=IF([.C247]&gt;[.$D$9];&quot;&quot;;[.D247]-[.E247])">
            <text:p/>
          </table:table-cell>
          <table:table-cell table:style-name="ce433" table:formula="of:=IF([.C247]&gt;[.$D$9];&quot;&quot;;[.G246]-[.F24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7]=[.$D$9];[.C247]=&quot;&quot;);&quot;&quot;;IF(ISNUMBER([.C247]);[.C247]+1;1))">
            <text:p/>
          </table:table-cell>
          <table:table-cell table:style-name="ce433" table:formula="of:=IF([.C248]&gt;[.$D$9];&quot;&quot;;PMT([.$D$7];[.$D$9];[.$D$3])*-1)">
            <text:p/>
          </table:table-cell>
          <table:table-cell table:style-name="ce433" table:formula="of:=IF([.C248]&gt;[.$D$9];&quot;&quot;;[.$D$7]*[.G247])">
            <text:p/>
          </table:table-cell>
          <table:table-cell table:style-name="ce439" table:formula="of:=IF([.C248]&gt;[.$D$9];&quot;&quot;;[.D248]-[.E248])">
            <text:p/>
          </table:table-cell>
          <table:table-cell table:style-name="ce433" table:formula="of:=IF([.C248]&gt;[.$D$9];&quot;&quot;;[.G247]-[.F24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8]=[.$D$9];[.C248]=&quot;&quot;);&quot;&quot;;IF(ISNUMBER([.C248]);[.C248]+1;1))">
            <text:p/>
          </table:table-cell>
          <table:table-cell table:style-name="ce433" table:formula="of:=IF([.C249]&gt;[.$D$9];&quot;&quot;;PMT([.$D$7];[.$D$9];[.$D$3])*-1)">
            <text:p/>
          </table:table-cell>
          <table:table-cell table:style-name="ce433" table:formula="of:=IF([.C249]&gt;[.$D$9];&quot;&quot;;[.$D$7]*[.G248])">
            <text:p/>
          </table:table-cell>
          <table:table-cell table:style-name="ce439" table:formula="of:=IF([.C249]&gt;[.$D$9];&quot;&quot;;[.D249]-[.E249])">
            <text:p/>
          </table:table-cell>
          <table:table-cell table:style-name="ce433" table:formula="of:=IF([.C249]&gt;[.$D$9];&quot;&quot;;[.G248]-[.F24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49]=[.$D$9];[.C249]=&quot;&quot;);&quot;&quot;;IF(ISNUMBER([.C249]);[.C249]+1;1))">
            <text:p/>
          </table:table-cell>
          <table:table-cell table:style-name="ce433" table:formula="of:=IF([.C250]&gt;[.$D$9];&quot;&quot;;PMT([.$D$7];[.$D$9];[.$D$3])*-1)">
            <text:p/>
          </table:table-cell>
          <table:table-cell table:style-name="ce433" table:formula="of:=IF([.C250]&gt;[.$D$9];&quot;&quot;;[.$D$7]*[.G249])">
            <text:p/>
          </table:table-cell>
          <table:table-cell table:style-name="ce439" table:formula="of:=IF([.C250]&gt;[.$D$9];&quot;&quot;;[.D250]-[.E250])">
            <text:p/>
          </table:table-cell>
          <table:table-cell table:style-name="ce433" table:formula="of:=IF([.C250]&gt;[.$D$9];&quot;&quot;;[.G249]-[.F25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0]=[.$D$9];[.C250]=&quot;&quot;);&quot;&quot;;IF(ISNUMBER([.C250]);[.C250]+1;1))">
            <text:p/>
          </table:table-cell>
          <table:table-cell table:style-name="ce433" table:formula="of:=IF([.C251]&gt;[.$D$9];&quot;&quot;;PMT([.$D$7];[.$D$9];[.$D$3])*-1)">
            <text:p/>
          </table:table-cell>
          <table:table-cell table:style-name="ce433" table:formula="of:=IF([.C251]&gt;[.$D$9];&quot;&quot;;[.$D$7]*[.G250])">
            <text:p/>
          </table:table-cell>
          <table:table-cell table:style-name="ce439" table:formula="of:=IF([.C251]&gt;[.$D$9];&quot;&quot;;[.D251]-[.E251])">
            <text:p/>
          </table:table-cell>
          <table:table-cell table:style-name="ce433" table:formula="of:=IF([.C251]&gt;[.$D$9];&quot;&quot;;[.G250]-[.F25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1]=[.$D$9];[.C251]=&quot;&quot;);&quot;&quot;;IF(ISNUMBER([.C251]);[.C251]+1;1))">
            <text:p/>
          </table:table-cell>
          <table:table-cell table:style-name="ce433" table:formula="of:=IF([.C252]&gt;[.$D$9];&quot;&quot;;PMT([.$D$7];[.$D$9];[.$D$3])*-1)">
            <text:p/>
          </table:table-cell>
          <table:table-cell table:style-name="ce433" table:formula="of:=IF([.C252]&gt;[.$D$9];&quot;&quot;;[.$D$7]*[.G251])">
            <text:p/>
          </table:table-cell>
          <table:table-cell table:style-name="ce439" table:formula="of:=IF([.C252]&gt;[.$D$9];&quot;&quot;;[.D252]-[.E252])">
            <text:p/>
          </table:table-cell>
          <table:table-cell table:style-name="ce433" table:formula="of:=IF([.C252]&gt;[.$D$9];&quot;&quot;;[.G251]-[.F25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2]=[.$D$9];[.C252]=&quot;&quot;);&quot;&quot;;IF(ISNUMBER([.C252]);[.C252]+1;1))">
            <text:p/>
          </table:table-cell>
          <table:table-cell table:style-name="ce433" table:formula="of:=IF([.C253]&gt;[.$D$9];&quot;&quot;;PMT([.$D$7];[.$D$9];[.$D$3])*-1)">
            <text:p/>
          </table:table-cell>
          <table:table-cell table:style-name="ce433" table:formula="of:=IF([.C253]&gt;[.$D$9];&quot;&quot;;[.$D$7]*[.G252])">
            <text:p/>
          </table:table-cell>
          <table:table-cell table:style-name="ce439" table:formula="of:=IF([.C253]&gt;[.$D$9];&quot;&quot;;[.D253]-[.E253])">
            <text:p/>
          </table:table-cell>
          <table:table-cell table:style-name="ce433" table:formula="of:=IF([.C253]&gt;[.$D$9];&quot;&quot;;[.G252]-[.F25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3]=[.$D$9];[.C253]=&quot;&quot;);&quot;&quot;;IF(ISNUMBER([.C253]);[.C253]+1;1))">
            <text:p/>
          </table:table-cell>
          <table:table-cell table:style-name="ce433" table:formula="of:=IF([.C254]&gt;[.$D$9];&quot;&quot;;PMT([.$D$7];[.$D$9];[.$D$3])*-1)">
            <text:p/>
          </table:table-cell>
          <table:table-cell table:style-name="ce433" table:formula="of:=IF([.C254]&gt;[.$D$9];&quot;&quot;;[.$D$7]*[.G253])">
            <text:p/>
          </table:table-cell>
          <table:table-cell table:style-name="ce439" table:formula="of:=IF([.C254]&gt;[.$D$9];&quot;&quot;;[.D254]-[.E254])">
            <text:p/>
          </table:table-cell>
          <table:table-cell table:style-name="ce433" table:formula="of:=IF([.C254]&gt;[.$D$9];&quot;&quot;;[.G253]-[.F25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4]=[.$D$9];[.C254]=&quot;&quot;);&quot;&quot;;IF(ISNUMBER([.C254]);[.C254]+1;1))">
            <text:p/>
          </table:table-cell>
          <table:table-cell table:style-name="ce433" table:formula="of:=IF([.C255]&gt;[.$D$9];&quot;&quot;;PMT([.$D$7];[.$D$9];[.$D$3])*-1)">
            <text:p/>
          </table:table-cell>
          <table:table-cell table:style-name="ce433" table:formula="of:=IF([.C255]&gt;[.$D$9];&quot;&quot;;[.$D$7]*[.G254])">
            <text:p/>
          </table:table-cell>
          <table:table-cell table:style-name="ce439" table:formula="of:=IF([.C255]&gt;[.$D$9];&quot;&quot;;[.D255]-[.E255])">
            <text:p/>
          </table:table-cell>
          <table:table-cell table:style-name="ce433" table:formula="of:=IF([.C255]&gt;[.$D$9];&quot;&quot;;[.G254]-[.F25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5]=[.$D$9];[.C255]=&quot;&quot;);&quot;&quot;;IF(ISNUMBER([.C255]);[.C255]+1;1))">
            <text:p/>
          </table:table-cell>
          <table:table-cell table:style-name="ce433" table:formula="of:=IF([.C256]&gt;[.$D$9];&quot;&quot;;PMT([.$D$7];[.$D$9];[.$D$3])*-1)">
            <text:p/>
          </table:table-cell>
          <table:table-cell table:style-name="ce433" table:formula="of:=IF([.C256]&gt;[.$D$9];&quot;&quot;;[.$D$7]*[.G255])">
            <text:p/>
          </table:table-cell>
          <table:table-cell table:style-name="ce439" table:formula="of:=IF([.C256]&gt;[.$D$9];&quot;&quot;;[.D256]-[.E256])">
            <text:p/>
          </table:table-cell>
          <table:table-cell table:style-name="ce433" table:formula="of:=IF([.C256]&gt;[.$D$9];&quot;&quot;;[.G255]-[.F25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6]=[.$D$9];[.C256]=&quot;&quot;);&quot;&quot;;IF(ISNUMBER([.C256]);[.C256]+1;1))">
            <text:p/>
          </table:table-cell>
          <table:table-cell table:style-name="ce433" table:formula="of:=IF([.C257]&gt;[.$D$9];&quot;&quot;;PMT([.$D$7];[.$D$9];[.$D$3])*-1)">
            <text:p/>
          </table:table-cell>
          <table:table-cell table:style-name="ce433" table:formula="of:=IF([.C257]&gt;[.$D$9];&quot;&quot;;[.$D$7]*[.G256])">
            <text:p/>
          </table:table-cell>
          <table:table-cell table:style-name="ce439" table:formula="of:=IF([.C257]&gt;[.$D$9];&quot;&quot;;[.D257]-[.E257])">
            <text:p/>
          </table:table-cell>
          <table:table-cell table:style-name="ce433" table:formula="of:=IF([.C257]&gt;[.$D$9];&quot;&quot;;[.G256]-[.F25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7]=[.$D$9];[.C257]=&quot;&quot;);&quot;&quot;;IF(ISNUMBER([.C257]);[.C257]+1;1))">
            <text:p/>
          </table:table-cell>
          <table:table-cell table:style-name="ce433" table:formula="of:=IF([.C258]&gt;[.$D$9];&quot;&quot;;PMT([.$D$7];[.$D$9];[.$D$3])*-1)">
            <text:p/>
          </table:table-cell>
          <table:table-cell table:style-name="ce433" table:formula="of:=IF([.C258]&gt;[.$D$9];&quot;&quot;;[.$D$7]*[.G257])">
            <text:p/>
          </table:table-cell>
          <table:table-cell table:style-name="ce439" table:formula="of:=IF([.C258]&gt;[.$D$9];&quot;&quot;;[.D258]-[.E258])">
            <text:p/>
          </table:table-cell>
          <table:table-cell table:style-name="ce433" table:formula="of:=IF([.C258]&gt;[.$D$9];&quot;&quot;;[.G257]-[.F25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8]=[.$D$9];[.C258]=&quot;&quot;);&quot;&quot;;IF(ISNUMBER([.C258]);[.C258]+1;1))">
            <text:p/>
          </table:table-cell>
          <table:table-cell table:style-name="ce433" table:formula="of:=IF([.C259]&gt;[.$D$9];&quot;&quot;;PMT([.$D$7];[.$D$9];[.$D$3])*-1)">
            <text:p/>
          </table:table-cell>
          <table:table-cell table:style-name="ce433" table:formula="of:=IF([.C259]&gt;[.$D$9];&quot;&quot;;[.$D$7]*[.G258])">
            <text:p/>
          </table:table-cell>
          <table:table-cell table:style-name="ce439" table:formula="of:=IF([.C259]&gt;[.$D$9];&quot;&quot;;[.D259]-[.E259])">
            <text:p/>
          </table:table-cell>
          <table:table-cell table:style-name="ce433" table:formula="of:=IF([.C259]&gt;[.$D$9];&quot;&quot;;[.G258]-[.F25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59]=[.$D$9];[.C259]=&quot;&quot;);&quot;&quot;;IF(ISNUMBER([.C259]);[.C259]+1;1))">
            <text:p/>
          </table:table-cell>
          <table:table-cell table:style-name="ce433" table:formula="of:=IF([.C260]&gt;[.$D$9];&quot;&quot;;PMT([.$D$7];[.$D$9];[.$D$3])*-1)">
            <text:p/>
          </table:table-cell>
          <table:table-cell table:style-name="ce433" table:formula="of:=IF([.C260]&gt;[.$D$9];&quot;&quot;;[.$D$7]*[.G259])">
            <text:p/>
          </table:table-cell>
          <table:table-cell table:style-name="ce439" table:formula="of:=IF([.C260]&gt;[.$D$9];&quot;&quot;;[.D260]-[.E260])">
            <text:p/>
          </table:table-cell>
          <table:table-cell table:style-name="ce433" table:formula="of:=IF([.C260]&gt;[.$D$9];&quot;&quot;;[.G259]-[.F26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0]=[.$D$9];[.C260]=&quot;&quot;);&quot;&quot;;IF(ISNUMBER([.C260]);[.C260]+1;1))">
            <text:p/>
          </table:table-cell>
          <table:table-cell table:style-name="ce433" table:formula="of:=IF([.C261]&gt;[.$D$9];&quot;&quot;;PMT([.$D$7];[.$D$9];[.$D$3])*-1)">
            <text:p/>
          </table:table-cell>
          <table:table-cell table:style-name="ce433" table:formula="of:=IF([.C261]&gt;[.$D$9];&quot;&quot;;[.$D$7]*[.G260])">
            <text:p/>
          </table:table-cell>
          <table:table-cell table:style-name="ce439" table:formula="of:=IF([.C261]&gt;[.$D$9];&quot;&quot;;[.D261]-[.E261])">
            <text:p/>
          </table:table-cell>
          <table:table-cell table:style-name="ce433" table:formula="of:=IF([.C261]&gt;[.$D$9];&quot;&quot;;[.G260]-[.F26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1]=[.$D$9];[.C261]=&quot;&quot;);&quot;&quot;;IF(ISNUMBER([.C261]);[.C261]+1;1))">
            <text:p/>
          </table:table-cell>
          <table:table-cell table:style-name="ce433" table:formula="of:=IF([.C262]&gt;[.$D$9];&quot;&quot;;PMT([.$D$7];[.$D$9];[.$D$3])*-1)">
            <text:p/>
          </table:table-cell>
          <table:table-cell table:style-name="ce433" table:formula="of:=IF([.C262]&gt;[.$D$9];&quot;&quot;;[.$D$7]*[.G261])">
            <text:p/>
          </table:table-cell>
          <table:table-cell table:style-name="ce439" table:formula="of:=IF([.C262]&gt;[.$D$9];&quot;&quot;;[.D262]-[.E262])">
            <text:p/>
          </table:table-cell>
          <table:table-cell table:style-name="ce433" table:formula="of:=IF([.C262]&gt;[.$D$9];&quot;&quot;;[.G261]-[.F26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2]=[.$D$9];[.C262]=&quot;&quot;);&quot;&quot;;IF(ISNUMBER([.C262]);[.C262]+1;1))">
            <text:p/>
          </table:table-cell>
          <table:table-cell table:style-name="ce433" table:formula="of:=IF([.C263]&gt;[.$D$9];&quot;&quot;;PMT([.$D$7];[.$D$9];[.$D$3])*-1)">
            <text:p/>
          </table:table-cell>
          <table:table-cell table:style-name="ce433" table:formula="of:=IF([.C263]&gt;[.$D$9];&quot;&quot;;[.$D$7]*[.G262])">
            <text:p/>
          </table:table-cell>
          <table:table-cell table:style-name="ce439" table:formula="of:=IF([.C263]&gt;[.$D$9];&quot;&quot;;[.D263]-[.E263])">
            <text:p/>
          </table:table-cell>
          <table:table-cell table:style-name="ce433" table:formula="of:=IF([.C263]&gt;[.$D$9];&quot;&quot;;[.G262]-[.F26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3]=[.$D$9];[.C263]=&quot;&quot;);&quot;&quot;;IF(ISNUMBER([.C263]);[.C263]+1;1))">
            <text:p/>
          </table:table-cell>
          <table:table-cell table:style-name="ce433" table:formula="of:=IF([.C264]&gt;[.$D$9];&quot;&quot;;PMT([.$D$7];[.$D$9];[.$D$3])*-1)">
            <text:p/>
          </table:table-cell>
          <table:table-cell table:style-name="ce433" table:formula="of:=IF([.C264]&gt;[.$D$9];&quot;&quot;;[.$D$7]*[.G263])">
            <text:p/>
          </table:table-cell>
          <table:table-cell table:style-name="ce439" table:formula="of:=IF([.C264]&gt;[.$D$9];&quot;&quot;;[.D264]-[.E264])">
            <text:p/>
          </table:table-cell>
          <table:table-cell table:style-name="ce433" table:formula="of:=IF([.C264]&gt;[.$D$9];&quot;&quot;;[.G263]-[.F26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4]=[.$D$9];[.C264]=&quot;&quot;);&quot;&quot;;IF(ISNUMBER([.C264]);[.C264]+1;1))">
            <text:p/>
          </table:table-cell>
          <table:table-cell table:style-name="ce433" table:formula="of:=IF([.C265]&gt;[.$D$9];&quot;&quot;;PMT([.$D$7];[.$D$9];[.$D$3])*-1)">
            <text:p/>
          </table:table-cell>
          <table:table-cell table:style-name="ce433" table:formula="of:=IF([.C265]&gt;[.$D$9];&quot;&quot;;[.$D$7]*[.G264])">
            <text:p/>
          </table:table-cell>
          <table:table-cell table:style-name="ce439" table:formula="of:=IF([.C265]&gt;[.$D$9];&quot;&quot;;[.D265]-[.E265])">
            <text:p/>
          </table:table-cell>
          <table:table-cell table:style-name="ce433" table:formula="of:=IF([.C265]&gt;[.$D$9];&quot;&quot;;[.G264]-[.F26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5]=[.$D$9];[.C265]=&quot;&quot;);&quot;&quot;;IF(ISNUMBER([.C265]);[.C265]+1;1))">
            <text:p/>
          </table:table-cell>
          <table:table-cell table:style-name="ce433" table:formula="of:=IF([.C266]&gt;[.$D$9];&quot;&quot;;PMT([.$D$7];[.$D$9];[.$D$3])*-1)">
            <text:p/>
          </table:table-cell>
          <table:table-cell table:style-name="ce433" table:formula="of:=IF([.C266]&gt;[.$D$9];&quot;&quot;;[.$D$7]*[.G265])">
            <text:p/>
          </table:table-cell>
          <table:table-cell table:style-name="ce439" table:formula="of:=IF([.C266]&gt;[.$D$9];&quot;&quot;;[.D266]-[.E266])">
            <text:p/>
          </table:table-cell>
          <table:table-cell table:style-name="ce433" table:formula="of:=IF([.C266]&gt;[.$D$9];&quot;&quot;;[.G265]-[.F26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6]=[.$D$9];[.C266]=&quot;&quot;);&quot;&quot;;IF(ISNUMBER([.C266]);[.C266]+1;1))">
            <text:p/>
          </table:table-cell>
          <table:table-cell table:style-name="ce433" table:formula="of:=IF([.C267]&gt;[.$D$9];&quot;&quot;;PMT([.$D$7];[.$D$9];[.$D$3])*-1)">
            <text:p/>
          </table:table-cell>
          <table:table-cell table:style-name="ce433" table:formula="of:=IF([.C267]&gt;[.$D$9];&quot;&quot;;[.$D$7]*[.G266])">
            <text:p/>
          </table:table-cell>
          <table:table-cell table:style-name="ce439" table:formula="of:=IF([.C267]&gt;[.$D$9];&quot;&quot;;[.D267]-[.E267])">
            <text:p/>
          </table:table-cell>
          <table:table-cell table:style-name="ce433" table:formula="of:=IF([.C267]&gt;[.$D$9];&quot;&quot;;[.G266]-[.F26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7]=[.$D$9];[.C267]=&quot;&quot;);&quot;&quot;;IF(ISNUMBER([.C267]);[.C267]+1;1))">
            <text:p/>
          </table:table-cell>
          <table:table-cell table:style-name="ce433" table:formula="of:=IF([.C268]&gt;[.$D$9];&quot;&quot;;PMT([.$D$7];[.$D$9];[.$D$3])*-1)">
            <text:p/>
          </table:table-cell>
          <table:table-cell table:style-name="ce433" table:formula="of:=IF([.C268]&gt;[.$D$9];&quot;&quot;;[.$D$7]*[.G267])">
            <text:p/>
          </table:table-cell>
          <table:table-cell table:style-name="ce439" table:formula="of:=IF([.C268]&gt;[.$D$9];&quot;&quot;;[.D268]-[.E268])">
            <text:p/>
          </table:table-cell>
          <table:table-cell table:style-name="ce433" table:formula="of:=IF([.C268]&gt;[.$D$9];&quot;&quot;;[.G267]-[.F26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8]=[.$D$9];[.C268]=&quot;&quot;);&quot;&quot;;IF(ISNUMBER([.C268]);[.C268]+1;1))">
            <text:p/>
          </table:table-cell>
          <table:table-cell table:style-name="ce433" table:formula="of:=IF([.C269]&gt;[.$D$9];&quot;&quot;;PMT([.$D$7];[.$D$9];[.$D$3])*-1)">
            <text:p/>
          </table:table-cell>
          <table:table-cell table:style-name="ce433" table:formula="of:=IF([.C269]&gt;[.$D$9];&quot;&quot;;[.$D$7]*[.G268])">
            <text:p/>
          </table:table-cell>
          <table:table-cell table:style-name="ce439" table:formula="of:=IF([.C269]&gt;[.$D$9];&quot;&quot;;[.D269]-[.E269])">
            <text:p/>
          </table:table-cell>
          <table:table-cell table:style-name="ce433" table:formula="of:=IF([.C269]&gt;[.$D$9];&quot;&quot;;[.G268]-[.F26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69]=[.$D$9];[.C269]=&quot;&quot;);&quot;&quot;;IF(ISNUMBER([.C269]);[.C269]+1;1))">
            <text:p/>
          </table:table-cell>
          <table:table-cell table:style-name="ce433" table:formula="of:=IF([.C270]&gt;[.$D$9];&quot;&quot;;PMT([.$D$7];[.$D$9];[.$D$3])*-1)">
            <text:p/>
          </table:table-cell>
          <table:table-cell table:style-name="ce433" table:formula="of:=IF([.C270]&gt;[.$D$9];&quot;&quot;;[.$D$7]*[.G269])">
            <text:p/>
          </table:table-cell>
          <table:table-cell table:style-name="ce439" table:formula="of:=IF([.C270]&gt;[.$D$9];&quot;&quot;;[.D270]-[.E270])">
            <text:p/>
          </table:table-cell>
          <table:table-cell table:style-name="ce433" table:formula="of:=IF([.C270]&gt;[.$D$9];&quot;&quot;;[.G269]-[.F27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0]=[.$D$9];[.C270]=&quot;&quot;);&quot;&quot;;IF(ISNUMBER([.C270]);[.C270]+1;1))">
            <text:p/>
          </table:table-cell>
          <table:table-cell table:style-name="ce433" table:formula="of:=IF([.C271]&gt;[.$D$9];&quot;&quot;;PMT([.$D$7];[.$D$9];[.$D$3])*-1)">
            <text:p/>
          </table:table-cell>
          <table:table-cell table:style-name="ce433" table:formula="of:=IF([.C271]&gt;[.$D$9];&quot;&quot;;[.$D$7]*[.G270])">
            <text:p/>
          </table:table-cell>
          <table:table-cell table:style-name="ce439" table:formula="of:=IF([.C271]&gt;[.$D$9];&quot;&quot;;[.D271]-[.E271])">
            <text:p/>
          </table:table-cell>
          <table:table-cell table:style-name="ce433" table:formula="of:=IF([.C271]&gt;[.$D$9];&quot;&quot;;[.G270]-[.F27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1]=[.$D$9];[.C271]=&quot;&quot;);&quot;&quot;;IF(ISNUMBER([.C271]);[.C271]+1;1))">
            <text:p/>
          </table:table-cell>
          <table:table-cell table:style-name="ce433" table:formula="of:=IF([.C272]&gt;[.$D$9];&quot;&quot;;PMT([.$D$7];[.$D$9];[.$D$3])*-1)">
            <text:p/>
          </table:table-cell>
          <table:table-cell table:style-name="ce433" table:formula="of:=IF([.C272]&gt;[.$D$9];&quot;&quot;;[.$D$7]*[.G271])">
            <text:p/>
          </table:table-cell>
          <table:table-cell table:style-name="ce439" table:formula="of:=IF([.C272]&gt;[.$D$9];&quot;&quot;;[.D272]-[.E272])">
            <text:p/>
          </table:table-cell>
          <table:table-cell table:style-name="ce433" table:formula="of:=IF([.C272]&gt;[.$D$9];&quot;&quot;;[.G271]-[.F27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2]=[.$D$9];[.C272]=&quot;&quot;);&quot;&quot;;IF(ISNUMBER([.C272]);[.C272]+1;1))">
            <text:p/>
          </table:table-cell>
          <table:table-cell table:style-name="ce433" table:formula="of:=IF([.C273]&gt;[.$D$9];&quot;&quot;;PMT([.$D$7];[.$D$9];[.$D$3])*-1)">
            <text:p/>
          </table:table-cell>
          <table:table-cell table:style-name="ce433" table:formula="of:=IF([.C273]&gt;[.$D$9];&quot;&quot;;[.$D$7]*[.G272])">
            <text:p/>
          </table:table-cell>
          <table:table-cell table:style-name="ce439" table:formula="of:=IF([.C273]&gt;[.$D$9];&quot;&quot;;[.D273]-[.E273])">
            <text:p/>
          </table:table-cell>
          <table:table-cell table:style-name="ce433" table:formula="of:=IF([.C273]&gt;[.$D$9];&quot;&quot;;[.G272]-[.F27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3]=[.$D$9];[.C273]=&quot;&quot;);&quot;&quot;;IF(ISNUMBER([.C273]);[.C273]+1;1))">
            <text:p/>
          </table:table-cell>
          <table:table-cell table:style-name="ce433" table:formula="of:=IF([.C274]&gt;[.$D$9];&quot;&quot;;PMT([.$D$7];[.$D$9];[.$D$3])*-1)">
            <text:p/>
          </table:table-cell>
          <table:table-cell table:style-name="ce433" table:formula="of:=IF([.C274]&gt;[.$D$9];&quot;&quot;;[.$D$7]*[.G273])">
            <text:p/>
          </table:table-cell>
          <table:table-cell table:style-name="ce439" table:formula="of:=IF([.C274]&gt;[.$D$9];&quot;&quot;;[.D274]-[.E274])">
            <text:p/>
          </table:table-cell>
          <table:table-cell table:style-name="ce433" table:formula="of:=IF([.C274]&gt;[.$D$9];&quot;&quot;;[.G273]-[.F27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4]=[.$D$9];[.C274]=&quot;&quot;);&quot;&quot;;IF(ISNUMBER([.C274]);[.C274]+1;1))">
            <text:p/>
          </table:table-cell>
          <table:table-cell table:style-name="ce433" table:formula="of:=IF([.C275]&gt;[.$D$9];&quot;&quot;;PMT([.$D$7];[.$D$9];[.$D$3])*-1)">
            <text:p/>
          </table:table-cell>
          <table:table-cell table:style-name="ce433" table:formula="of:=IF([.C275]&gt;[.$D$9];&quot;&quot;;[.$D$7]*[.G274])">
            <text:p/>
          </table:table-cell>
          <table:table-cell table:style-name="ce439" table:formula="of:=IF([.C275]&gt;[.$D$9];&quot;&quot;;[.D275]-[.E275])">
            <text:p/>
          </table:table-cell>
          <table:table-cell table:style-name="ce433" table:formula="of:=IF([.C275]&gt;[.$D$9];&quot;&quot;;[.G274]-[.F27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5]=[.$D$9];[.C275]=&quot;&quot;);&quot;&quot;;IF(ISNUMBER([.C275]);[.C275]+1;1))">
            <text:p/>
          </table:table-cell>
          <table:table-cell table:style-name="ce433" table:formula="of:=IF([.C276]&gt;[.$D$9];&quot;&quot;;PMT([.$D$7];[.$D$9];[.$D$3])*-1)">
            <text:p/>
          </table:table-cell>
          <table:table-cell table:style-name="ce433" table:formula="of:=IF([.C276]&gt;[.$D$9];&quot;&quot;;[.$D$7]*[.G275])">
            <text:p/>
          </table:table-cell>
          <table:table-cell table:style-name="ce439" table:formula="of:=IF([.C276]&gt;[.$D$9];&quot;&quot;;[.D276]-[.E276])">
            <text:p/>
          </table:table-cell>
          <table:table-cell table:style-name="ce433" table:formula="of:=IF([.C276]&gt;[.$D$9];&quot;&quot;;[.G275]-[.F27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6]=[.$D$9];[.C276]=&quot;&quot;);&quot;&quot;;IF(ISNUMBER([.C276]);[.C276]+1;1))">
            <text:p/>
          </table:table-cell>
          <table:table-cell table:style-name="ce433" table:formula="of:=IF([.C277]&gt;[.$D$9];&quot;&quot;;PMT([.$D$7];[.$D$9];[.$D$3])*-1)">
            <text:p/>
          </table:table-cell>
          <table:table-cell table:style-name="ce433" table:formula="of:=IF([.C277]&gt;[.$D$9];&quot;&quot;;[.$D$7]*[.G276])">
            <text:p/>
          </table:table-cell>
          <table:table-cell table:style-name="ce439" table:formula="of:=IF([.C277]&gt;[.$D$9];&quot;&quot;;[.D277]-[.E277])">
            <text:p/>
          </table:table-cell>
          <table:table-cell table:style-name="ce433" table:formula="of:=IF([.C277]&gt;[.$D$9];&quot;&quot;;[.G276]-[.F27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7]=[.$D$9];[.C277]=&quot;&quot;);&quot;&quot;;IF(ISNUMBER([.C277]);[.C277]+1;1))">
            <text:p/>
          </table:table-cell>
          <table:table-cell table:style-name="ce433" table:formula="of:=IF([.C278]&gt;[.$D$9];&quot;&quot;;PMT([.$D$7];[.$D$9];[.$D$3])*-1)">
            <text:p/>
          </table:table-cell>
          <table:table-cell table:style-name="ce433" table:formula="of:=IF([.C278]&gt;[.$D$9];&quot;&quot;;[.$D$7]*[.G277])">
            <text:p/>
          </table:table-cell>
          <table:table-cell table:style-name="ce439" table:formula="of:=IF([.C278]&gt;[.$D$9];&quot;&quot;;[.D278]-[.E278])">
            <text:p/>
          </table:table-cell>
          <table:table-cell table:style-name="ce433" table:formula="of:=IF([.C278]&gt;[.$D$9];&quot;&quot;;[.G277]-[.F27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8]=[.$D$9];[.C278]=&quot;&quot;);&quot;&quot;;IF(ISNUMBER([.C278]);[.C278]+1;1))">
            <text:p/>
          </table:table-cell>
          <table:table-cell table:style-name="ce433" table:formula="of:=IF([.C279]&gt;[.$D$9];&quot;&quot;;PMT([.$D$7];[.$D$9];[.$D$3])*-1)">
            <text:p/>
          </table:table-cell>
          <table:table-cell table:style-name="ce433" table:formula="of:=IF([.C279]&gt;[.$D$9];&quot;&quot;;[.$D$7]*[.G278])">
            <text:p/>
          </table:table-cell>
          <table:table-cell table:style-name="ce439" table:formula="of:=IF([.C279]&gt;[.$D$9];&quot;&quot;;[.D279]-[.E279])">
            <text:p/>
          </table:table-cell>
          <table:table-cell table:style-name="ce433" table:formula="of:=IF([.C279]&gt;[.$D$9];&quot;&quot;;[.G278]-[.F27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79]=[.$D$9];[.C279]=&quot;&quot;);&quot;&quot;;IF(ISNUMBER([.C279]);[.C279]+1;1))">
            <text:p/>
          </table:table-cell>
          <table:table-cell table:style-name="ce433" table:formula="of:=IF([.C280]&gt;[.$D$9];&quot;&quot;;PMT([.$D$7];[.$D$9];[.$D$3])*-1)">
            <text:p/>
          </table:table-cell>
          <table:table-cell table:style-name="ce433" table:formula="of:=IF([.C280]&gt;[.$D$9];&quot;&quot;;[.$D$7]*[.G279])">
            <text:p/>
          </table:table-cell>
          <table:table-cell table:style-name="ce439" table:formula="of:=IF([.C280]&gt;[.$D$9];&quot;&quot;;[.D280]-[.E280])">
            <text:p/>
          </table:table-cell>
          <table:table-cell table:style-name="ce433" table:formula="of:=IF([.C280]&gt;[.$D$9];&quot;&quot;;[.G279]-[.F28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0]=[.$D$9];[.C280]=&quot;&quot;);&quot;&quot;;IF(ISNUMBER([.C280]);[.C280]+1;1))">
            <text:p/>
          </table:table-cell>
          <table:table-cell table:style-name="ce433" table:formula="of:=IF([.C281]&gt;[.$D$9];&quot;&quot;;PMT([.$D$7];[.$D$9];[.$D$3])*-1)">
            <text:p/>
          </table:table-cell>
          <table:table-cell table:style-name="ce433" table:formula="of:=IF([.C281]&gt;[.$D$9];&quot;&quot;;[.$D$7]*[.G280])">
            <text:p/>
          </table:table-cell>
          <table:table-cell table:style-name="ce439" table:formula="of:=IF([.C281]&gt;[.$D$9];&quot;&quot;;[.D281]-[.E281])">
            <text:p/>
          </table:table-cell>
          <table:table-cell table:style-name="ce433" table:formula="of:=IF([.C281]&gt;[.$D$9];&quot;&quot;;[.G280]-[.F28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1]=[.$D$9];[.C281]=&quot;&quot;);&quot;&quot;;IF(ISNUMBER([.C281]);[.C281]+1;1))">
            <text:p/>
          </table:table-cell>
          <table:table-cell table:style-name="ce433" table:formula="of:=IF([.C282]&gt;[.$D$9];&quot;&quot;;PMT([.$D$7];[.$D$9];[.$D$3])*-1)">
            <text:p/>
          </table:table-cell>
          <table:table-cell table:style-name="ce433" table:formula="of:=IF([.C282]&gt;[.$D$9];&quot;&quot;;[.$D$7]*[.G281])">
            <text:p/>
          </table:table-cell>
          <table:table-cell table:style-name="ce439" table:formula="of:=IF([.C282]&gt;[.$D$9];&quot;&quot;;[.D282]-[.E282])">
            <text:p/>
          </table:table-cell>
          <table:table-cell table:style-name="ce433" table:formula="of:=IF([.C282]&gt;[.$D$9];&quot;&quot;;[.G281]-[.F28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2]=[.$D$9];[.C282]=&quot;&quot;);&quot;&quot;;IF(ISNUMBER([.C282]);[.C282]+1;1))">
            <text:p/>
          </table:table-cell>
          <table:table-cell table:style-name="ce433" table:formula="of:=IF([.C283]&gt;[.$D$9];&quot;&quot;;PMT([.$D$7];[.$D$9];[.$D$3])*-1)">
            <text:p/>
          </table:table-cell>
          <table:table-cell table:style-name="ce433" table:formula="of:=IF([.C283]&gt;[.$D$9];&quot;&quot;;[.$D$7]*[.G282])">
            <text:p/>
          </table:table-cell>
          <table:table-cell table:style-name="ce439" table:formula="of:=IF([.C283]&gt;[.$D$9];&quot;&quot;;[.D283]-[.E283])">
            <text:p/>
          </table:table-cell>
          <table:table-cell table:style-name="ce433" table:formula="of:=IF([.C283]&gt;[.$D$9];&quot;&quot;;[.G282]-[.F28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3]=[.$D$9];[.C283]=&quot;&quot;);&quot;&quot;;IF(ISNUMBER([.C283]);[.C283]+1;1))">
            <text:p/>
          </table:table-cell>
          <table:table-cell table:style-name="ce433" table:formula="of:=IF([.C284]&gt;[.$D$9];&quot;&quot;;PMT([.$D$7];[.$D$9];[.$D$3])*-1)">
            <text:p/>
          </table:table-cell>
          <table:table-cell table:style-name="ce433" table:formula="of:=IF([.C284]&gt;[.$D$9];&quot;&quot;;[.$D$7]*[.G283])">
            <text:p/>
          </table:table-cell>
          <table:table-cell table:style-name="ce439" table:formula="of:=IF([.C284]&gt;[.$D$9];&quot;&quot;;[.D284]-[.E284])">
            <text:p/>
          </table:table-cell>
          <table:table-cell table:style-name="ce433" table:formula="of:=IF([.C284]&gt;[.$D$9];&quot;&quot;;[.G283]-[.F28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4]=[.$D$9];[.C284]=&quot;&quot;);&quot;&quot;;IF(ISNUMBER([.C284]);[.C284]+1;1))">
            <text:p/>
          </table:table-cell>
          <table:table-cell table:style-name="ce433" table:formula="of:=IF([.C285]&gt;[.$D$9];&quot;&quot;;PMT([.$D$7];[.$D$9];[.$D$3])*-1)">
            <text:p/>
          </table:table-cell>
          <table:table-cell table:style-name="ce433" table:formula="of:=IF([.C285]&gt;[.$D$9];&quot;&quot;;[.$D$7]*[.G284])">
            <text:p/>
          </table:table-cell>
          <table:table-cell table:style-name="ce439" table:formula="of:=IF([.C285]&gt;[.$D$9];&quot;&quot;;[.D285]-[.E285])">
            <text:p/>
          </table:table-cell>
          <table:table-cell table:style-name="ce433" table:formula="of:=IF([.C285]&gt;[.$D$9];&quot;&quot;;[.G284]-[.F28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5]=[.$D$9];[.C285]=&quot;&quot;);&quot;&quot;;IF(ISNUMBER([.C285]);[.C285]+1;1))">
            <text:p/>
          </table:table-cell>
          <table:table-cell table:style-name="ce433" table:formula="of:=IF([.C286]&gt;[.$D$9];&quot;&quot;;PMT([.$D$7];[.$D$9];[.$D$3])*-1)">
            <text:p/>
          </table:table-cell>
          <table:table-cell table:style-name="ce433" table:formula="of:=IF([.C286]&gt;[.$D$9];&quot;&quot;;[.$D$7]*[.G285])">
            <text:p/>
          </table:table-cell>
          <table:table-cell table:style-name="ce439" table:formula="of:=IF([.C286]&gt;[.$D$9];&quot;&quot;;[.D286]-[.E286])">
            <text:p/>
          </table:table-cell>
          <table:table-cell table:style-name="ce433" table:formula="of:=IF([.C286]&gt;[.$D$9];&quot;&quot;;[.G285]-[.F28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6]=[.$D$9];[.C286]=&quot;&quot;);&quot;&quot;;IF(ISNUMBER([.C286]);[.C286]+1;1))">
            <text:p/>
          </table:table-cell>
          <table:table-cell table:style-name="ce433" table:formula="of:=IF([.C287]&gt;[.$D$9];&quot;&quot;;PMT([.$D$7];[.$D$9];[.$D$3])*-1)">
            <text:p/>
          </table:table-cell>
          <table:table-cell table:style-name="ce433" table:formula="of:=IF([.C287]&gt;[.$D$9];&quot;&quot;;[.$D$7]*[.G286])">
            <text:p/>
          </table:table-cell>
          <table:table-cell table:style-name="ce439" table:formula="of:=IF([.C287]&gt;[.$D$9];&quot;&quot;;[.D287]-[.E287])">
            <text:p/>
          </table:table-cell>
          <table:table-cell table:style-name="ce433" table:formula="of:=IF([.C287]&gt;[.$D$9];&quot;&quot;;[.G286]-[.F28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7]=[.$D$9];[.C287]=&quot;&quot;);&quot;&quot;;IF(ISNUMBER([.C287]);[.C287]+1;1))">
            <text:p/>
          </table:table-cell>
          <table:table-cell table:style-name="ce433" table:formula="of:=IF([.C288]&gt;[.$D$9];&quot;&quot;;PMT([.$D$7];[.$D$9];[.$D$3])*-1)">
            <text:p/>
          </table:table-cell>
          <table:table-cell table:style-name="ce433" table:formula="of:=IF([.C288]&gt;[.$D$9];&quot;&quot;;[.$D$7]*[.G287])">
            <text:p/>
          </table:table-cell>
          <table:table-cell table:style-name="ce439" table:formula="of:=IF([.C288]&gt;[.$D$9];&quot;&quot;;[.D288]-[.E288])">
            <text:p/>
          </table:table-cell>
          <table:table-cell table:style-name="ce433" table:formula="of:=IF([.C288]&gt;[.$D$9];&quot;&quot;;[.G287]-[.F28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8]=[.$D$9];[.C288]=&quot;&quot;);&quot;&quot;;IF(ISNUMBER([.C288]);[.C288]+1;1))">
            <text:p/>
          </table:table-cell>
          <table:table-cell table:style-name="ce433" table:formula="of:=IF([.C289]&gt;[.$D$9];&quot;&quot;;PMT([.$D$7];[.$D$9];[.$D$3])*-1)">
            <text:p/>
          </table:table-cell>
          <table:table-cell table:style-name="ce433" table:formula="of:=IF([.C289]&gt;[.$D$9];&quot;&quot;;[.$D$7]*[.G288])">
            <text:p/>
          </table:table-cell>
          <table:table-cell table:style-name="ce439" table:formula="of:=IF([.C289]&gt;[.$D$9];&quot;&quot;;[.D289]-[.E289])">
            <text:p/>
          </table:table-cell>
          <table:table-cell table:style-name="ce433" table:formula="of:=IF([.C289]&gt;[.$D$9];&quot;&quot;;[.G288]-[.F28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89]=[.$D$9];[.C289]=&quot;&quot;);&quot;&quot;;IF(ISNUMBER([.C289]);[.C289]+1;1))">
            <text:p/>
          </table:table-cell>
          <table:table-cell table:style-name="ce433" table:formula="of:=IF([.C290]&gt;[.$D$9];&quot;&quot;;PMT([.$D$7];[.$D$9];[.$D$3])*-1)">
            <text:p/>
          </table:table-cell>
          <table:table-cell table:style-name="ce433" table:formula="of:=IF([.C290]&gt;[.$D$9];&quot;&quot;;[.$D$7]*[.G289])">
            <text:p/>
          </table:table-cell>
          <table:table-cell table:style-name="ce439" table:formula="of:=IF([.C290]&gt;[.$D$9];&quot;&quot;;[.D290]-[.E290])">
            <text:p/>
          </table:table-cell>
          <table:table-cell table:style-name="ce433" table:formula="of:=IF([.C290]&gt;[.$D$9];&quot;&quot;;[.G289]-[.F29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0]=[.$D$9];[.C290]=&quot;&quot;);&quot;&quot;;IF(ISNUMBER([.C290]);[.C290]+1;1))">
            <text:p/>
          </table:table-cell>
          <table:table-cell table:style-name="ce433" table:formula="of:=IF([.C291]&gt;[.$D$9];&quot;&quot;;PMT([.$D$7];[.$D$9];[.$D$3])*-1)">
            <text:p/>
          </table:table-cell>
          <table:table-cell table:style-name="ce433" table:formula="of:=IF([.C291]&gt;[.$D$9];&quot;&quot;;[.$D$7]*[.G290])">
            <text:p/>
          </table:table-cell>
          <table:table-cell table:style-name="ce439" table:formula="of:=IF([.C291]&gt;[.$D$9];&quot;&quot;;[.D291]-[.E291])">
            <text:p/>
          </table:table-cell>
          <table:table-cell table:style-name="ce433" table:formula="of:=IF([.C291]&gt;[.$D$9];&quot;&quot;;[.G290]-[.F29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1]=[.$D$9];[.C291]=&quot;&quot;);&quot;&quot;;IF(ISNUMBER([.C291]);[.C291]+1;1))">
            <text:p/>
          </table:table-cell>
          <table:table-cell table:style-name="ce433" table:formula="of:=IF([.C292]&gt;[.$D$9];&quot;&quot;;PMT([.$D$7];[.$D$9];[.$D$3])*-1)">
            <text:p/>
          </table:table-cell>
          <table:table-cell table:style-name="ce433" table:formula="of:=IF([.C292]&gt;[.$D$9];&quot;&quot;;[.$D$7]*[.G291])">
            <text:p/>
          </table:table-cell>
          <table:table-cell table:style-name="ce439" table:formula="of:=IF([.C292]&gt;[.$D$9];&quot;&quot;;[.D292]-[.E292])">
            <text:p/>
          </table:table-cell>
          <table:table-cell table:style-name="ce433" table:formula="of:=IF([.C292]&gt;[.$D$9];&quot;&quot;;[.G291]-[.F29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2]=[.$D$9];[.C292]=&quot;&quot;);&quot;&quot;;IF(ISNUMBER([.C292]);[.C292]+1;1))">
            <text:p/>
          </table:table-cell>
          <table:table-cell table:style-name="ce433" table:formula="of:=IF([.C293]&gt;[.$D$9];&quot;&quot;;PMT([.$D$7];[.$D$9];[.$D$3])*-1)">
            <text:p/>
          </table:table-cell>
          <table:table-cell table:style-name="ce433" table:formula="of:=IF([.C293]&gt;[.$D$9];&quot;&quot;;[.$D$7]*[.G292])">
            <text:p/>
          </table:table-cell>
          <table:table-cell table:style-name="ce439" table:formula="of:=IF([.C293]&gt;[.$D$9];&quot;&quot;;[.D293]-[.E293])">
            <text:p/>
          </table:table-cell>
          <table:table-cell table:style-name="ce433" table:formula="of:=IF([.C293]&gt;[.$D$9];&quot;&quot;;[.G292]-[.F29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3]=[.$D$9];[.C293]=&quot;&quot;);&quot;&quot;;IF(ISNUMBER([.C293]);[.C293]+1;1))">
            <text:p/>
          </table:table-cell>
          <table:table-cell table:style-name="ce433" table:formula="of:=IF([.C294]&gt;[.$D$9];&quot;&quot;;PMT([.$D$7];[.$D$9];[.$D$3])*-1)">
            <text:p/>
          </table:table-cell>
          <table:table-cell table:style-name="ce433" table:formula="of:=IF([.C294]&gt;[.$D$9];&quot;&quot;;[.$D$7]*[.G293])">
            <text:p/>
          </table:table-cell>
          <table:table-cell table:style-name="ce439" table:formula="of:=IF([.C294]&gt;[.$D$9];&quot;&quot;;[.D294]-[.E294])">
            <text:p/>
          </table:table-cell>
          <table:table-cell table:style-name="ce433" table:formula="of:=IF([.C294]&gt;[.$D$9];&quot;&quot;;[.G293]-[.F29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4]=[.$D$9];[.C294]=&quot;&quot;);&quot;&quot;;IF(ISNUMBER([.C294]);[.C294]+1;1))">
            <text:p/>
          </table:table-cell>
          <table:table-cell table:style-name="ce433" table:formula="of:=IF([.C295]&gt;[.$D$9];&quot;&quot;;PMT([.$D$7];[.$D$9];[.$D$3])*-1)">
            <text:p/>
          </table:table-cell>
          <table:table-cell table:style-name="ce433" table:formula="of:=IF([.C295]&gt;[.$D$9];&quot;&quot;;[.$D$7]*[.G294])">
            <text:p/>
          </table:table-cell>
          <table:table-cell table:style-name="ce439" table:formula="of:=IF([.C295]&gt;[.$D$9];&quot;&quot;;[.D295]-[.E295])">
            <text:p/>
          </table:table-cell>
          <table:table-cell table:style-name="ce433" table:formula="of:=IF([.C295]&gt;[.$D$9];&quot;&quot;;[.G294]-[.F29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5]=[.$D$9];[.C295]=&quot;&quot;);&quot;&quot;;IF(ISNUMBER([.C295]);[.C295]+1;1))">
            <text:p/>
          </table:table-cell>
          <table:table-cell table:style-name="ce433" table:formula="of:=IF([.C296]&gt;[.$D$9];&quot;&quot;;PMT([.$D$7];[.$D$9];[.$D$3])*-1)">
            <text:p/>
          </table:table-cell>
          <table:table-cell table:style-name="ce433" table:formula="of:=IF([.C296]&gt;[.$D$9];&quot;&quot;;[.$D$7]*[.G295])">
            <text:p/>
          </table:table-cell>
          <table:table-cell table:style-name="ce439" table:formula="of:=IF([.C296]&gt;[.$D$9];&quot;&quot;;[.D296]-[.E296])">
            <text:p/>
          </table:table-cell>
          <table:table-cell table:style-name="ce433" table:formula="of:=IF([.C296]&gt;[.$D$9];&quot;&quot;;[.G295]-[.F29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6]=[.$D$9];[.C296]=&quot;&quot;);&quot;&quot;;IF(ISNUMBER([.C296]);[.C296]+1;1))">
            <text:p/>
          </table:table-cell>
          <table:table-cell table:style-name="ce433" table:formula="of:=IF([.C297]&gt;[.$D$9];&quot;&quot;;PMT([.$D$7];[.$D$9];[.$D$3])*-1)">
            <text:p/>
          </table:table-cell>
          <table:table-cell table:style-name="ce433" table:formula="of:=IF([.C297]&gt;[.$D$9];&quot;&quot;;[.$D$7]*[.G296])">
            <text:p/>
          </table:table-cell>
          <table:table-cell table:style-name="ce439" table:formula="of:=IF([.C297]&gt;[.$D$9];&quot;&quot;;[.D297]-[.E297])">
            <text:p/>
          </table:table-cell>
          <table:table-cell table:style-name="ce433" table:formula="of:=IF([.C297]&gt;[.$D$9];&quot;&quot;;[.G296]-[.F29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7]=[.$D$9];[.C297]=&quot;&quot;);&quot;&quot;;IF(ISNUMBER([.C297]);[.C297]+1;1))">
            <text:p/>
          </table:table-cell>
          <table:table-cell table:style-name="ce433" table:formula="of:=IF([.C298]&gt;[.$D$9];&quot;&quot;;PMT([.$D$7];[.$D$9];[.$D$3])*-1)">
            <text:p/>
          </table:table-cell>
          <table:table-cell table:style-name="ce433" table:formula="of:=IF([.C298]&gt;[.$D$9];&quot;&quot;;[.$D$7]*[.G297])">
            <text:p/>
          </table:table-cell>
          <table:table-cell table:style-name="ce439" table:formula="of:=IF([.C298]&gt;[.$D$9];&quot;&quot;;[.D298]-[.E298])">
            <text:p/>
          </table:table-cell>
          <table:table-cell table:style-name="ce433" table:formula="of:=IF([.C298]&gt;[.$D$9];&quot;&quot;;[.G297]-[.F29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8]=[.$D$9];[.C298]=&quot;&quot;);&quot;&quot;;IF(ISNUMBER([.C298]);[.C298]+1;1))">
            <text:p/>
          </table:table-cell>
          <table:table-cell table:style-name="ce433" table:formula="of:=IF([.C299]&gt;[.$D$9];&quot;&quot;;PMT([.$D$7];[.$D$9];[.$D$3])*-1)">
            <text:p/>
          </table:table-cell>
          <table:table-cell table:style-name="ce433" table:formula="of:=IF([.C299]&gt;[.$D$9];&quot;&quot;;[.$D$7]*[.G298])">
            <text:p/>
          </table:table-cell>
          <table:table-cell table:style-name="ce439" table:formula="of:=IF([.C299]&gt;[.$D$9];&quot;&quot;;[.D299]-[.E299])">
            <text:p/>
          </table:table-cell>
          <table:table-cell table:style-name="ce433" table:formula="of:=IF([.C299]&gt;[.$D$9];&quot;&quot;;[.G298]-[.F29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299]=[.$D$9];[.C299]=&quot;&quot;);&quot;&quot;;IF(ISNUMBER([.C299]);[.C299]+1;1))">
            <text:p/>
          </table:table-cell>
          <table:table-cell table:style-name="ce433" table:formula="of:=IF([.C300]&gt;[.$D$9];&quot;&quot;;PMT([.$D$7];[.$D$9];[.$D$3])*-1)">
            <text:p/>
          </table:table-cell>
          <table:table-cell table:style-name="ce433" table:formula="of:=IF([.C300]&gt;[.$D$9];&quot;&quot;;[.$D$7]*[.G299])">
            <text:p/>
          </table:table-cell>
          <table:table-cell table:style-name="ce439" table:formula="of:=IF([.C300]&gt;[.$D$9];&quot;&quot;;[.D300]-[.E300])">
            <text:p/>
          </table:table-cell>
          <table:table-cell table:style-name="ce433" table:formula="of:=IF([.C300]&gt;[.$D$9];&quot;&quot;;[.G299]-[.F30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0]=[.$D$9];[.C300]=&quot;&quot;);&quot;&quot;;IF(ISNUMBER([.C300]);[.C300]+1;1))">
            <text:p/>
          </table:table-cell>
          <table:table-cell table:style-name="ce433" table:formula="of:=IF([.C301]&gt;[.$D$9];&quot;&quot;;PMT([.$D$7];[.$D$9];[.$D$3])*-1)">
            <text:p/>
          </table:table-cell>
          <table:table-cell table:style-name="ce433" table:formula="of:=IF([.C301]&gt;[.$D$9];&quot;&quot;;[.$D$7]*[.G300])">
            <text:p/>
          </table:table-cell>
          <table:table-cell table:style-name="ce439" table:formula="of:=IF([.C301]&gt;[.$D$9];&quot;&quot;;[.D301]-[.E301])">
            <text:p/>
          </table:table-cell>
          <table:table-cell table:style-name="ce433" table:formula="of:=IF([.C301]&gt;[.$D$9];&quot;&quot;;[.G300]-[.F30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1]=[.$D$9];[.C301]=&quot;&quot;);&quot;&quot;;IF(ISNUMBER([.C301]);[.C301]+1;1))">
            <text:p/>
          </table:table-cell>
          <table:table-cell table:style-name="ce433" table:formula="of:=IF([.C302]&gt;[.$D$9];&quot;&quot;;PMT([.$D$7];[.$D$9];[.$D$3])*-1)">
            <text:p/>
          </table:table-cell>
          <table:table-cell table:style-name="ce433" table:formula="of:=IF([.C302]&gt;[.$D$9];&quot;&quot;;[.$D$7]*[.G301])">
            <text:p/>
          </table:table-cell>
          <table:table-cell table:style-name="ce439" table:formula="of:=IF([.C302]&gt;[.$D$9];&quot;&quot;;[.D302]-[.E302])">
            <text:p/>
          </table:table-cell>
          <table:table-cell table:style-name="ce433" table:formula="of:=IF([.C302]&gt;[.$D$9];&quot;&quot;;[.G301]-[.F30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2]=[.$D$9];[.C302]=&quot;&quot;);&quot;&quot;;IF(ISNUMBER([.C302]);[.C302]+1;1))">
            <text:p/>
          </table:table-cell>
          <table:table-cell table:style-name="ce433" table:formula="of:=IF([.C303]&gt;[.$D$9];&quot;&quot;;PMT([.$D$7];[.$D$9];[.$D$3])*-1)">
            <text:p/>
          </table:table-cell>
          <table:table-cell table:style-name="ce433" table:formula="of:=IF([.C303]&gt;[.$D$9];&quot;&quot;;[.$D$7]*[.G302])">
            <text:p/>
          </table:table-cell>
          <table:table-cell table:style-name="ce439" table:formula="of:=IF([.C303]&gt;[.$D$9];&quot;&quot;;[.D303]-[.E303])">
            <text:p/>
          </table:table-cell>
          <table:table-cell table:style-name="ce433" table:formula="of:=IF([.C303]&gt;[.$D$9];&quot;&quot;;[.G302]-[.F30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3]=[.$D$9];[.C303]=&quot;&quot;);&quot;&quot;;IF(ISNUMBER([.C303]);[.C303]+1;1))">
            <text:p/>
          </table:table-cell>
          <table:table-cell table:style-name="ce433" table:formula="of:=IF([.C304]&gt;[.$D$9];&quot;&quot;;PMT([.$D$7];[.$D$9];[.$D$3])*-1)">
            <text:p/>
          </table:table-cell>
          <table:table-cell table:style-name="ce433" table:formula="of:=IF([.C304]&gt;[.$D$9];&quot;&quot;;[.$D$7]*[.G303])">
            <text:p/>
          </table:table-cell>
          <table:table-cell table:style-name="ce439" table:formula="of:=IF([.C304]&gt;[.$D$9];&quot;&quot;;[.D304]-[.E304])">
            <text:p/>
          </table:table-cell>
          <table:table-cell table:style-name="ce433" table:formula="of:=IF([.C304]&gt;[.$D$9];&quot;&quot;;[.G303]-[.F30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4]=[.$D$9];[.C304]=&quot;&quot;);&quot;&quot;;IF(ISNUMBER([.C304]);[.C304]+1;1))">
            <text:p/>
          </table:table-cell>
          <table:table-cell table:style-name="ce433" table:formula="of:=IF([.C305]&gt;[.$D$9];&quot;&quot;;PMT([.$D$7];[.$D$9];[.$D$3])*-1)">
            <text:p/>
          </table:table-cell>
          <table:table-cell table:style-name="ce433" table:formula="of:=IF([.C305]&gt;[.$D$9];&quot;&quot;;[.$D$7]*[.G304])">
            <text:p/>
          </table:table-cell>
          <table:table-cell table:style-name="ce439" table:formula="of:=IF([.C305]&gt;[.$D$9];&quot;&quot;;[.D305]-[.E305])">
            <text:p/>
          </table:table-cell>
          <table:table-cell table:style-name="ce433" table:formula="of:=IF([.C305]&gt;[.$D$9];&quot;&quot;;[.G304]-[.F30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5]=[.$D$9];[.C305]=&quot;&quot;);&quot;&quot;;IF(ISNUMBER([.C305]);[.C305]+1;1))">
            <text:p/>
          </table:table-cell>
          <table:table-cell table:style-name="ce433" table:formula="of:=IF([.C306]&gt;[.$D$9];&quot;&quot;;PMT([.$D$7];[.$D$9];[.$D$3])*-1)">
            <text:p/>
          </table:table-cell>
          <table:table-cell table:style-name="ce433" table:formula="of:=IF([.C306]&gt;[.$D$9];&quot;&quot;;[.$D$7]*[.G305])">
            <text:p/>
          </table:table-cell>
          <table:table-cell table:style-name="ce439" table:formula="of:=IF([.C306]&gt;[.$D$9];&quot;&quot;;[.D306]-[.E306])">
            <text:p/>
          </table:table-cell>
          <table:table-cell table:style-name="ce433" table:formula="of:=IF([.C306]&gt;[.$D$9];&quot;&quot;;[.G305]-[.F30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6]=[.$D$9];[.C306]=&quot;&quot;);&quot;&quot;;IF(ISNUMBER([.C306]);[.C306]+1;1))">
            <text:p/>
          </table:table-cell>
          <table:table-cell table:style-name="ce433" table:formula="of:=IF([.C307]&gt;[.$D$9];&quot;&quot;;PMT([.$D$7];[.$D$9];[.$D$3])*-1)">
            <text:p/>
          </table:table-cell>
          <table:table-cell table:style-name="ce433" table:formula="of:=IF([.C307]&gt;[.$D$9];&quot;&quot;;[.$D$7]*[.G306])">
            <text:p/>
          </table:table-cell>
          <table:table-cell table:style-name="ce439" table:formula="of:=IF([.C307]&gt;[.$D$9];&quot;&quot;;[.D307]-[.E307])">
            <text:p/>
          </table:table-cell>
          <table:table-cell table:style-name="ce433" table:formula="of:=IF([.C307]&gt;[.$D$9];&quot;&quot;;[.G306]-[.F30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7]=[.$D$9];[.C307]=&quot;&quot;);&quot;&quot;;IF(ISNUMBER([.C307]);[.C307]+1;1))">
            <text:p/>
          </table:table-cell>
          <table:table-cell table:style-name="ce433" table:formula="of:=IF([.C308]&gt;[.$D$9];&quot;&quot;;PMT([.$D$7];[.$D$9];[.$D$3])*-1)">
            <text:p/>
          </table:table-cell>
          <table:table-cell table:style-name="ce433" table:formula="of:=IF([.C308]&gt;[.$D$9];&quot;&quot;;[.$D$7]*[.G307])">
            <text:p/>
          </table:table-cell>
          <table:table-cell table:style-name="ce439" table:formula="of:=IF([.C308]&gt;[.$D$9];&quot;&quot;;[.D308]-[.E308])">
            <text:p/>
          </table:table-cell>
          <table:table-cell table:style-name="ce433" table:formula="of:=IF([.C308]&gt;[.$D$9];&quot;&quot;;[.G307]-[.F30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8]=[.$D$9];[.C308]=&quot;&quot;);&quot;&quot;;IF(ISNUMBER([.C308]);[.C308]+1;1))">
            <text:p/>
          </table:table-cell>
          <table:table-cell table:style-name="ce433" table:formula="of:=IF([.C309]&gt;[.$D$9];&quot;&quot;;PMT([.$D$7];[.$D$9];[.$D$3])*-1)">
            <text:p/>
          </table:table-cell>
          <table:table-cell table:style-name="ce433" table:formula="of:=IF([.C309]&gt;[.$D$9];&quot;&quot;;[.$D$7]*[.G308])">
            <text:p/>
          </table:table-cell>
          <table:table-cell table:style-name="ce439" table:formula="of:=IF([.C309]&gt;[.$D$9];&quot;&quot;;[.D309]-[.E309])">
            <text:p/>
          </table:table-cell>
          <table:table-cell table:style-name="ce433" table:formula="of:=IF([.C309]&gt;[.$D$9];&quot;&quot;;[.G308]-[.F30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09]=[.$D$9];[.C309]=&quot;&quot;);&quot;&quot;;IF(ISNUMBER([.C309]);[.C309]+1;1))">
            <text:p/>
          </table:table-cell>
          <table:table-cell table:style-name="ce433" table:formula="of:=IF([.C310]&gt;[.$D$9];&quot;&quot;;PMT([.$D$7];[.$D$9];[.$D$3])*-1)">
            <text:p/>
          </table:table-cell>
          <table:table-cell table:style-name="ce433" table:formula="of:=IF([.C310]&gt;[.$D$9];&quot;&quot;;[.$D$7]*[.G309])">
            <text:p/>
          </table:table-cell>
          <table:table-cell table:style-name="ce439" table:formula="of:=IF([.C310]&gt;[.$D$9];&quot;&quot;;[.D310]-[.E310])">
            <text:p/>
          </table:table-cell>
          <table:table-cell table:style-name="ce433" table:formula="of:=IF([.C310]&gt;[.$D$9];&quot;&quot;;[.G309]-[.F31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0]=[.$D$9];[.C310]=&quot;&quot;);&quot;&quot;;IF(ISNUMBER([.C310]);[.C310]+1;1))">
            <text:p/>
          </table:table-cell>
          <table:table-cell table:style-name="ce433" table:formula="of:=IF([.C311]&gt;[.$D$9];&quot;&quot;;PMT([.$D$7];[.$D$9];[.$D$3])*-1)">
            <text:p/>
          </table:table-cell>
          <table:table-cell table:style-name="ce433" table:formula="of:=IF([.C311]&gt;[.$D$9];&quot;&quot;;[.$D$7]*[.G310])">
            <text:p/>
          </table:table-cell>
          <table:table-cell table:style-name="ce439" table:formula="of:=IF([.C311]&gt;[.$D$9];&quot;&quot;;[.D311]-[.E311])">
            <text:p/>
          </table:table-cell>
          <table:table-cell table:style-name="ce433" table:formula="of:=IF([.C311]&gt;[.$D$9];&quot;&quot;;[.G310]-[.F31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1]=[.$D$9];[.C311]=&quot;&quot;);&quot;&quot;;IF(ISNUMBER([.C311]);[.C311]+1;1))">
            <text:p/>
          </table:table-cell>
          <table:table-cell table:style-name="ce433" table:formula="of:=IF([.C312]&gt;[.$D$9];&quot;&quot;;PMT([.$D$7];[.$D$9];[.$D$3])*-1)">
            <text:p/>
          </table:table-cell>
          <table:table-cell table:style-name="ce433" table:formula="of:=IF([.C312]&gt;[.$D$9];&quot;&quot;;[.$D$7]*[.G311])">
            <text:p/>
          </table:table-cell>
          <table:table-cell table:style-name="ce439" table:formula="of:=IF([.C312]&gt;[.$D$9];&quot;&quot;;[.D312]-[.E312])">
            <text:p/>
          </table:table-cell>
          <table:table-cell table:style-name="ce433" table:formula="of:=IF([.C312]&gt;[.$D$9];&quot;&quot;;[.G311]-[.F31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2]=[.$D$9];[.C312]=&quot;&quot;);&quot;&quot;;IF(ISNUMBER([.C312]);[.C312]+1;1))">
            <text:p/>
          </table:table-cell>
          <table:table-cell table:style-name="ce433" table:formula="of:=IF([.C313]&gt;[.$D$9];&quot;&quot;;PMT([.$D$7];[.$D$9];[.$D$3])*-1)">
            <text:p/>
          </table:table-cell>
          <table:table-cell table:style-name="ce433" table:formula="of:=IF([.C313]&gt;[.$D$9];&quot;&quot;;[.$D$7]*[.G312])">
            <text:p/>
          </table:table-cell>
          <table:table-cell table:style-name="ce439" table:formula="of:=IF([.C313]&gt;[.$D$9];&quot;&quot;;[.D313]-[.E313])">
            <text:p/>
          </table:table-cell>
          <table:table-cell table:style-name="ce433" table:formula="of:=IF([.C313]&gt;[.$D$9];&quot;&quot;;[.G312]-[.F31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3]=[.$D$9];[.C313]=&quot;&quot;);&quot;&quot;;IF(ISNUMBER([.C313]);[.C313]+1;1))">
            <text:p/>
          </table:table-cell>
          <table:table-cell table:style-name="ce433" table:formula="of:=IF([.C314]&gt;[.$D$9];&quot;&quot;;PMT([.$D$7];[.$D$9];[.$D$3])*-1)">
            <text:p/>
          </table:table-cell>
          <table:table-cell table:style-name="ce433" table:formula="of:=IF([.C314]&gt;[.$D$9];&quot;&quot;;[.$D$7]*[.G313])">
            <text:p/>
          </table:table-cell>
          <table:table-cell table:style-name="ce439" table:formula="of:=IF([.C314]&gt;[.$D$9];&quot;&quot;;[.D314]-[.E314])">
            <text:p/>
          </table:table-cell>
          <table:table-cell table:style-name="ce433" table:formula="of:=IF([.C314]&gt;[.$D$9];&quot;&quot;;[.G313]-[.F31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4]=[.$D$9];[.C314]=&quot;&quot;);&quot;&quot;;IF(ISNUMBER([.C314]);[.C314]+1;1))">
            <text:p/>
          </table:table-cell>
          <table:table-cell table:style-name="ce433" table:formula="of:=IF([.C315]&gt;[.$D$9];&quot;&quot;;PMT([.$D$7];[.$D$9];[.$D$3])*-1)">
            <text:p/>
          </table:table-cell>
          <table:table-cell table:style-name="ce433" table:formula="of:=IF([.C315]&gt;[.$D$9];&quot;&quot;;[.$D$7]*[.G314])">
            <text:p/>
          </table:table-cell>
          <table:table-cell table:style-name="ce439" table:formula="of:=IF([.C315]&gt;[.$D$9];&quot;&quot;;[.D315]-[.E315])">
            <text:p/>
          </table:table-cell>
          <table:table-cell table:style-name="ce433" table:formula="of:=IF([.C315]&gt;[.$D$9];&quot;&quot;;[.G314]-[.F31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5]=[.$D$9];[.C315]=&quot;&quot;);&quot;&quot;;IF(ISNUMBER([.C315]);[.C315]+1;1))">
            <text:p/>
          </table:table-cell>
          <table:table-cell table:style-name="ce433" table:formula="of:=IF([.C316]&gt;[.$D$9];&quot;&quot;;PMT([.$D$7];[.$D$9];[.$D$3])*-1)">
            <text:p/>
          </table:table-cell>
          <table:table-cell table:style-name="ce433" table:formula="of:=IF([.C316]&gt;[.$D$9];&quot;&quot;;[.$D$7]*[.G315])">
            <text:p/>
          </table:table-cell>
          <table:table-cell table:style-name="ce439" table:formula="of:=IF([.C316]&gt;[.$D$9];&quot;&quot;;[.D316]-[.E316])">
            <text:p/>
          </table:table-cell>
          <table:table-cell table:style-name="ce433" table:formula="of:=IF([.C316]&gt;[.$D$9];&quot;&quot;;[.G315]-[.F31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6]=[.$D$9];[.C316]=&quot;&quot;);&quot;&quot;;IF(ISNUMBER([.C316]);[.C316]+1;1))">
            <text:p/>
          </table:table-cell>
          <table:table-cell table:style-name="ce433" table:formula="of:=IF([.C317]&gt;[.$D$9];&quot;&quot;;PMT([.$D$7];[.$D$9];[.$D$3])*-1)">
            <text:p/>
          </table:table-cell>
          <table:table-cell table:style-name="ce433" table:formula="of:=IF([.C317]&gt;[.$D$9];&quot;&quot;;[.$D$7]*[.G316])">
            <text:p/>
          </table:table-cell>
          <table:table-cell table:style-name="ce439" table:formula="of:=IF([.C317]&gt;[.$D$9];&quot;&quot;;[.D317]-[.E317])">
            <text:p/>
          </table:table-cell>
          <table:table-cell table:style-name="ce433" table:formula="of:=IF([.C317]&gt;[.$D$9];&quot;&quot;;[.G316]-[.F31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7]=[.$D$9];[.C317]=&quot;&quot;);&quot;&quot;;IF(ISNUMBER([.C317]);[.C317]+1;1))">
            <text:p/>
          </table:table-cell>
          <table:table-cell table:style-name="ce433" table:formula="of:=IF([.C318]&gt;[.$D$9];&quot;&quot;;PMT([.$D$7];[.$D$9];[.$D$3])*-1)">
            <text:p/>
          </table:table-cell>
          <table:table-cell table:style-name="ce433" table:formula="of:=IF([.C318]&gt;[.$D$9];&quot;&quot;;[.$D$7]*[.G317])">
            <text:p/>
          </table:table-cell>
          <table:table-cell table:style-name="ce439" table:formula="of:=IF([.C318]&gt;[.$D$9];&quot;&quot;;[.D318]-[.E318])">
            <text:p/>
          </table:table-cell>
          <table:table-cell table:style-name="ce433" table:formula="of:=IF([.C318]&gt;[.$D$9];&quot;&quot;;[.G317]-[.F31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8]=[.$D$9];[.C318]=&quot;&quot;);&quot;&quot;;IF(ISNUMBER([.C318]);[.C318]+1;1))">
            <text:p/>
          </table:table-cell>
          <table:table-cell table:style-name="ce433" table:formula="of:=IF([.C319]&gt;[.$D$9];&quot;&quot;;PMT([.$D$7];[.$D$9];[.$D$3])*-1)">
            <text:p/>
          </table:table-cell>
          <table:table-cell table:style-name="ce433" table:formula="of:=IF([.C319]&gt;[.$D$9];&quot;&quot;;[.$D$7]*[.G318])">
            <text:p/>
          </table:table-cell>
          <table:table-cell table:style-name="ce439" table:formula="of:=IF([.C319]&gt;[.$D$9];&quot;&quot;;[.D319]-[.E319])">
            <text:p/>
          </table:table-cell>
          <table:table-cell table:style-name="ce433" table:formula="of:=IF([.C319]&gt;[.$D$9];&quot;&quot;;[.G318]-[.F31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19]=[.$D$9];[.C319]=&quot;&quot;);&quot;&quot;;IF(ISNUMBER([.C319]);[.C319]+1;1))">
            <text:p/>
          </table:table-cell>
          <table:table-cell table:style-name="ce433" table:formula="of:=IF([.C320]&gt;[.$D$9];&quot;&quot;;PMT([.$D$7];[.$D$9];[.$D$3])*-1)">
            <text:p/>
          </table:table-cell>
          <table:table-cell table:style-name="ce433" table:formula="of:=IF([.C320]&gt;[.$D$9];&quot;&quot;;[.$D$7]*[.G319])">
            <text:p/>
          </table:table-cell>
          <table:table-cell table:style-name="ce439" table:formula="of:=IF([.C320]&gt;[.$D$9];&quot;&quot;;[.D320]-[.E320])">
            <text:p/>
          </table:table-cell>
          <table:table-cell table:style-name="ce433" table:formula="of:=IF([.C320]&gt;[.$D$9];&quot;&quot;;[.G319]-[.F32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0]=[.$D$9];[.C320]=&quot;&quot;);&quot;&quot;;IF(ISNUMBER([.C320]);[.C320]+1;1))">
            <text:p/>
          </table:table-cell>
          <table:table-cell table:style-name="ce433" table:formula="of:=IF([.C321]&gt;[.$D$9];&quot;&quot;;PMT([.$D$7];[.$D$9];[.$D$3])*-1)">
            <text:p/>
          </table:table-cell>
          <table:table-cell table:style-name="ce433" table:formula="of:=IF([.C321]&gt;[.$D$9];&quot;&quot;;[.$D$7]*[.G320])">
            <text:p/>
          </table:table-cell>
          <table:table-cell table:style-name="ce439" table:formula="of:=IF([.C321]&gt;[.$D$9];&quot;&quot;;[.D321]-[.E321])">
            <text:p/>
          </table:table-cell>
          <table:table-cell table:style-name="ce433" table:formula="of:=IF([.C321]&gt;[.$D$9];&quot;&quot;;[.G320]-[.F32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1]=[.$D$9];[.C321]=&quot;&quot;);&quot;&quot;;IF(ISNUMBER([.C321]);[.C321]+1;1))">
            <text:p/>
          </table:table-cell>
          <table:table-cell table:style-name="ce433" table:formula="of:=IF([.C322]&gt;[.$D$9];&quot;&quot;;PMT([.$D$7];[.$D$9];[.$D$3])*-1)">
            <text:p/>
          </table:table-cell>
          <table:table-cell table:style-name="ce433" table:formula="of:=IF([.C322]&gt;[.$D$9];&quot;&quot;;[.$D$7]*[.G321])">
            <text:p/>
          </table:table-cell>
          <table:table-cell table:style-name="ce439" table:formula="of:=IF([.C322]&gt;[.$D$9];&quot;&quot;;[.D322]-[.E322])">
            <text:p/>
          </table:table-cell>
          <table:table-cell table:style-name="ce433" table:formula="of:=IF([.C322]&gt;[.$D$9];&quot;&quot;;[.G321]-[.F32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2]=[.$D$9];[.C322]=&quot;&quot;);&quot;&quot;;IF(ISNUMBER([.C322]);[.C322]+1;1))">
            <text:p/>
          </table:table-cell>
          <table:table-cell table:style-name="ce433" table:formula="of:=IF([.C323]&gt;[.$D$9];&quot;&quot;;PMT([.$D$7];[.$D$9];[.$D$3])*-1)">
            <text:p/>
          </table:table-cell>
          <table:table-cell table:style-name="ce433" table:formula="of:=IF([.C323]&gt;[.$D$9];&quot;&quot;;[.$D$7]*[.G322])">
            <text:p/>
          </table:table-cell>
          <table:table-cell table:style-name="ce439" table:formula="of:=IF([.C323]&gt;[.$D$9];&quot;&quot;;[.D323]-[.E323])">
            <text:p/>
          </table:table-cell>
          <table:table-cell table:style-name="ce433" table:formula="of:=IF([.C323]&gt;[.$D$9];&quot;&quot;;[.G322]-[.F32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3]=[.$D$9];[.C323]=&quot;&quot;);&quot;&quot;;IF(ISNUMBER([.C323]);[.C323]+1;1))">
            <text:p/>
          </table:table-cell>
          <table:table-cell table:style-name="ce433" table:formula="of:=IF([.C324]&gt;[.$D$9];&quot;&quot;;PMT([.$D$7];[.$D$9];[.$D$3])*-1)">
            <text:p/>
          </table:table-cell>
          <table:table-cell table:style-name="ce433" table:formula="of:=IF([.C324]&gt;[.$D$9];&quot;&quot;;[.$D$7]*[.G323])">
            <text:p/>
          </table:table-cell>
          <table:table-cell table:style-name="ce439" table:formula="of:=IF([.C324]&gt;[.$D$9];&quot;&quot;;[.D324]-[.E324])">
            <text:p/>
          </table:table-cell>
          <table:table-cell table:style-name="ce433" table:formula="of:=IF([.C324]&gt;[.$D$9];&quot;&quot;;[.G323]-[.F32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4]=[.$D$9];[.C324]=&quot;&quot;);&quot;&quot;;IF(ISNUMBER([.C324]);[.C324]+1;1))">
            <text:p/>
          </table:table-cell>
          <table:table-cell table:style-name="ce433" table:formula="of:=IF([.C325]&gt;[.$D$9];&quot;&quot;;PMT([.$D$7];[.$D$9];[.$D$3])*-1)">
            <text:p/>
          </table:table-cell>
          <table:table-cell table:style-name="ce433" table:formula="of:=IF([.C325]&gt;[.$D$9];&quot;&quot;;[.$D$7]*[.G324])">
            <text:p/>
          </table:table-cell>
          <table:table-cell table:style-name="ce439" table:formula="of:=IF([.C325]&gt;[.$D$9];&quot;&quot;;[.D325]-[.E325])">
            <text:p/>
          </table:table-cell>
          <table:table-cell table:style-name="ce433" table:formula="of:=IF([.C325]&gt;[.$D$9];&quot;&quot;;[.G324]-[.F32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5]=[.$D$9];[.C325]=&quot;&quot;);&quot;&quot;;IF(ISNUMBER([.C325]);[.C325]+1;1))">
            <text:p/>
          </table:table-cell>
          <table:table-cell table:style-name="ce433" table:formula="of:=IF([.C326]&gt;[.$D$9];&quot;&quot;;PMT([.$D$7];[.$D$9];[.$D$3])*-1)">
            <text:p/>
          </table:table-cell>
          <table:table-cell table:style-name="ce433" table:formula="of:=IF([.C326]&gt;[.$D$9];&quot;&quot;;[.$D$7]*[.G325])">
            <text:p/>
          </table:table-cell>
          <table:table-cell table:style-name="ce439" table:formula="of:=IF([.C326]&gt;[.$D$9];&quot;&quot;;[.D326]-[.E326])">
            <text:p/>
          </table:table-cell>
          <table:table-cell table:style-name="ce433" table:formula="of:=IF([.C326]&gt;[.$D$9];&quot;&quot;;[.G325]-[.F32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6]=[.$D$9];[.C326]=&quot;&quot;);&quot;&quot;;IF(ISNUMBER([.C326]);[.C326]+1;1))">
            <text:p/>
          </table:table-cell>
          <table:table-cell table:style-name="ce433" table:formula="of:=IF([.C327]&gt;[.$D$9];&quot;&quot;;PMT([.$D$7];[.$D$9];[.$D$3])*-1)">
            <text:p/>
          </table:table-cell>
          <table:table-cell table:style-name="ce433" table:formula="of:=IF([.C327]&gt;[.$D$9];&quot;&quot;;[.$D$7]*[.G326])">
            <text:p/>
          </table:table-cell>
          <table:table-cell table:style-name="ce439" table:formula="of:=IF([.C327]&gt;[.$D$9];&quot;&quot;;[.D327]-[.E327])">
            <text:p/>
          </table:table-cell>
          <table:table-cell table:style-name="ce433" table:formula="of:=IF([.C327]&gt;[.$D$9];&quot;&quot;;[.G326]-[.F32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7]=[.$D$9];[.C327]=&quot;&quot;);&quot;&quot;;IF(ISNUMBER([.C327]);[.C327]+1;1))">
            <text:p/>
          </table:table-cell>
          <table:table-cell table:style-name="ce433" table:formula="of:=IF([.C328]&gt;[.$D$9];&quot;&quot;;PMT([.$D$7];[.$D$9];[.$D$3])*-1)">
            <text:p/>
          </table:table-cell>
          <table:table-cell table:style-name="ce433" table:formula="of:=IF([.C328]&gt;[.$D$9];&quot;&quot;;[.$D$7]*[.G327])">
            <text:p/>
          </table:table-cell>
          <table:table-cell table:style-name="ce439" table:formula="of:=IF([.C328]&gt;[.$D$9];&quot;&quot;;[.D328]-[.E328])">
            <text:p/>
          </table:table-cell>
          <table:table-cell table:style-name="ce433" table:formula="of:=IF([.C328]&gt;[.$D$9];&quot;&quot;;[.G327]-[.F32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8]=[.$D$9];[.C328]=&quot;&quot;);&quot;&quot;;IF(ISNUMBER([.C328]);[.C328]+1;1))">
            <text:p/>
          </table:table-cell>
          <table:table-cell table:style-name="ce433" table:formula="of:=IF([.C329]&gt;[.$D$9];&quot;&quot;;PMT([.$D$7];[.$D$9];[.$D$3])*-1)">
            <text:p/>
          </table:table-cell>
          <table:table-cell table:style-name="ce433" table:formula="of:=IF([.C329]&gt;[.$D$9];&quot;&quot;;[.$D$7]*[.G328])">
            <text:p/>
          </table:table-cell>
          <table:table-cell table:style-name="ce439" table:formula="of:=IF([.C329]&gt;[.$D$9];&quot;&quot;;[.D329]-[.E329])">
            <text:p/>
          </table:table-cell>
          <table:table-cell table:style-name="ce433" table:formula="of:=IF([.C329]&gt;[.$D$9];&quot;&quot;;[.G328]-[.F32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29]=[.$D$9];[.C329]=&quot;&quot;);&quot;&quot;;IF(ISNUMBER([.C329]);[.C329]+1;1))">
            <text:p/>
          </table:table-cell>
          <table:table-cell table:style-name="ce433" table:formula="of:=IF([.C330]&gt;[.$D$9];&quot;&quot;;PMT([.$D$7];[.$D$9];[.$D$3])*-1)">
            <text:p/>
          </table:table-cell>
          <table:table-cell table:style-name="ce433" table:formula="of:=IF([.C330]&gt;[.$D$9];&quot;&quot;;[.$D$7]*[.G329])">
            <text:p/>
          </table:table-cell>
          <table:table-cell table:style-name="ce439" table:formula="of:=IF([.C330]&gt;[.$D$9];&quot;&quot;;[.D330]-[.E330])">
            <text:p/>
          </table:table-cell>
          <table:table-cell table:style-name="ce433" table:formula="of:=IF([.C330]&gt;[.$D$9];&quot;&quot;;[.G329]-[.F33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0]=[.$D$9];[.C330]=&quot;&quot;);&quot;&quot;;IF(ISNUMBER([.C330]);[.C330]+1;1))">
            <text:p/>
          </table:table-cell>
          <table:table-cell table:style-name="ce433" table:formula="of:=IF([.C331]&gt;[.$D$9];&quot;&quot;;PMT([.$D$7];[.$D$9];[.$D$3])*-1)">
            <text:p/>
          </table:table-cell>
          <table:table-cell table:style-name="ce433" table:formula="of:=IF([.C331]&gt;[.$D$9];&quot;&quot;;[.$D$7]*[.G330])">
            <text:p/>
          </table:table-cell>
          <table:table-cell table:style-name="ce439" table:formula="of:=IF([.C331]&gt;[.$D$9];&quot;&quot;;[.D331]-[.E331])">
            <text:p/>
          </table:table-cell>
          <table:table-cell table:style-name="ce433" table:formula="of:=IF([.C331]&gt;[.$D$9];&quot;&quot;;[.G330]-[.F33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1]=[.$D$9];[.C331]=&quot;&quot;);&quot;&quot;;IF(ISNUMBER([.C331]);[.C331]+1;1))">
            <text:p/>
          </table:table-cell>
          <table:table-cell table:style-name="ce433" table:formula="of:=IF([.C332]&gt;[.$D$9];&quot;&quot;;PMT([.$D$7];[.$D$9];[.$D$3])*-1)">
            <text:p/>
          </table:table-cell>
          <table:table-cell table:style-name="ce433" table:formula="of:=IF([.C332]&gt;[.$D$9];&quot;&quot;;[.$D$7]*[.G331])">
            <text:p/>
          </table:table-cell>
          <table:table-cell table:style-name="ce439" table:formula="of:=IF([.C332]&gt;[.$D$9];&quot;&quot;;[.D332]-[.E332])">
            <text:p/>
          </table:table-cell>
          <table:table-cell table:style-name="ce433" table:formula="of:=IF([.C332]&gt;[.$D$9];&quot;&quot;;[.G331]-[.F33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2]=[.$D$9];[.C332]=&quot;&quot;);&quot;&quot;;IF(ISNUMBER([.C332]);[.C332]+1;1))">
            <text:p/>
          </table:table-cell>
          <table:table-cell table:style-name="ce433" table:formula="of:=IF([.C333]&gt;[.$D$9];&quot;&quot;;PMT([.$D$7];[.$D$9];[.$D$3])*-1)">
            <text:p/>
          </table:table-cell>
          <table:table-cell table:style-name="ce433" table:formula="of:=IF([.C333]&gt;[.$D$9];&quot;&quot;;[.$D$7]*[.G332])">
            <text:p/>
          </table:table-cell>
          <table:table-cell table:style-name="ce439" table:formula="of:=IF([.C333]&gt;[.$D$9];&quot;&quot;;[.D333]-[.E333])">
            <text:p/>
          </table:table-cell>
          <table:table-cell table:style-name="ce433" table:formula="of:=IF([.C333]&gt;[.$D$9];&quot;&quot;;[.G332]-[.F33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3]=[.$D$9];[.C333]=&quot;&quot;);&quot;&quot;;IF(ISNUMBER([.C333]);[.C333]+1;1))">
            <text:p/>
          </table:table-cell>
          <table:table-cell table:style-name="ce433" table:formula="of:=IF([.C334]&gt;[.$D$9];&quot;&quot;;PMT([.$D$7];[.$D$9];[.$D$3])*-1)">
            <text:p/>
          </table:table-cell>
          <table:table-cell table:style-name="ce433" table:formula="of:=IF([.C334]&gt;[.$D$9];&quot;&quot;;[.$D$7]*[.G333])">
            <text:p/>
          </table:table-cell>
          <table:table-cell table:style-name="ce439" table:formula="of:=IF([.C334]&gt;[.$D$9];&quot;&quot;;[.D334]-[.E334])">
            <text:p/>
          </table:table-cell>
          <table:table-cell table:style-name="ce433" table:formula="of:=IF([.C334]&gt;[.$D$9];&quot;&quot;;[.G333]-[.F33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4]=[.$D$9];[.C334]=&quot;&quot;);&quot;&quot;;IF(ISNUMBER([.C334]);[.C334]+1;1))">
            <text:p/>
          </table:table-cell>
          <table:table-cell table:style-name="ce433" table:formula="of:=IF([.C335]&gt;[.$D$9];&quot;&quot;;PMT([.$D$7];[.$D$9];[.$D$3])*-1)">
            <text:p/>
          </table:table-cell>
          <table:table-cell table:style-name="ce433" table:formula="of:=IF([.C335]&gt;[.$D$9];&quot;&quot;;[.$D$7]*[.G334])">
            <text:p/>
          </table:table-cell>
          <table:table-cell table:style-name="ce439" table:formula="of:=IF([.C335]&gt;[.$D$9];&quot;&quot;;[.D335]-[.E335])">
            <text:p/>
          </table:table-cell>
          <table:table-cell table:style-name="ce433" table:formula="of:=IF([.C335]&gt;[.$D$9];&quot;&quot;;[.G334]-[.F33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5]=[.$D$9];[.C335]=&quot;&quot;);&quot;&quot;;IF(ISNUMBER([.C335]);[.C335]+1;1))">
            <text:p/>
          </table:table-cell>
          <table:table-cell table:style-name="ce433" table:formula="of:=IF([.C336]&gt;[.$D$9];&quot;&quot;;PMT([.$D$7];[.$D$9];[.$D$3])*-1)">
            <text:p/>
          </table:table-cell>
          <table:table-cell table:style-name="ce433" table:formula="of:=IF([.C336]&gt;[.$D$9];&quot;&quot;;[.$D$7]*[.G335])">
            <text:p/>
          </table:table-cell>
          <table:table-cell table:style-name="ce439" table:formula="of:=IF([.C336]&gt;[.$D$9];&quot;&quot;;[.D336]-[.E336])">
            <text:p/>
          </table:table-cell>
          <table:table-cell table:style-name="ce433" table:formula="of:=IF([.C336]&gt;[.$D$9];&quot;&quot;;[.G335]-[.F33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6]=[.$D$9];[.C336]=&quot;&quot;);&quot;&quot;;IF(ISNUMBER([.C336]);[.C336]+1;1))">
            <text:p/>
          </table:table-cell>
          <table:table-cell table:style-name="ce433" table:formula="of:=IF([.C337]&gt;[.$D$9];&quot;&quot;;PMT([.$D$7];[.$D$9];[.$D$3])*-1)">
            <text:p/>
          </table:table-cell>
          <table:table-cell table:style-name="ce433" table:formula="of:=IF([.C337]&gt;[.$D$9];&quot;&quot;;[.$D$7]*[.G336])">
            <text:p/>
          </table:table-cell>
          <table:table-cell table:style-name="ce439" table:formula="of:=IF([.C337]&gt;[.$D$9];&quot;&quot;;[.D337]-[.E337])">
            <text:p/>
          </table:table-cell>
          <table:table-cell table:style-name="ce433" table:formula="of:=IF([.C337]&gt;[.$D$9];&quot;&quot;;[.G336]-[.F33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7]=[.$D$9];[.C337]=&quot;&quot;);&quot;&quot;;IF(ISNUMBER([.C337]);[.C337]+1;1))">
            <text:p/>
          </table:table-cell>
          <table:table-cell table:style-name="ce433" table:formula="of:=IF([.C338]&gt;[.$D$9];&quot;&quot;;PMT([.$D$7];[.$D$9];[.$D$3])*-1)">
            <text:p/>
          </table:table-cell>
          <table:table-cell table:style-name="ce433" table:formula="of:=IF([.C338]&gt;[.$D$9];&quot;&quot;;[.$D$7]*[.G337])">
            <text:p/>
          </table:table-cell>
          <table:table-cell table:style-name="ce439" table:formula="of:=IF([.C338]&gt;[.$D$9];&quot;&quot;;[.D338]-[.E338])">
            <text:p/>
          </table:table-cell>
          <table:table-cell table:style-name="ce433" table:formula="of:=IF([.C338]&gt;[.$D$9];&quot;&quot;;[.G337]-[.F33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8]=[.$D$9];[.C338]=&quot;&quot;);&quot;&quot;;IF(ISNUMBER([.C338]);[.C338]+1;1))">
            <text:p/>
          </table:table-cell>
          <table:table-cell table:style-name="ce433" table:formula="of:=IF([.C339]&gt;[.$D$9];&quot;&quot;;PMT([.$D$7];[.$D$9];[.$D$3])*-1)">
            <text:p/>
          </table:table-cell>
          <table:table-cell table:style-name="ce433" table:formula="of:=IF([.C339]&gt;[.$D$9];&quot;&quot;;[.$D$7]*[.G338])">
            <text:p/>
          </table:table-cell>
          <table:table-cell table:style-name="ce439" table:formula="of:=IF([.C339]&gt;[.$D$9];&quot;&quot;;[.D339]-[.E339])">
            <text:p/>
          </table:table-cell>
          <table:table-cell table:style-name="ce433" table:formula="of:=IF([.C339]&gt;[.$D$9];&quot;&quot;;[.G338]-[.F33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39]=[.$D$9];[.C339]=&quot;&quot;);&quot;&quot;;IF(ISNUMBER([.C339]);[.C339]+1;1))">
            <text:p/>
          </table:table-cell>
          <table:table-cell table:style-name="ce433" table:formula="of:=IF([.C340]&gt;[.$D$9];&quot;&quot;;PMT([.$D$7];[.$D$9];[.$D$3])*-1)">
            <text:p/>
          </table:table-cell>
          <table:table-cell table:style-name="ce433" table:formula="of:=IF([.C340]&gt;[.$D$9];&quot;&quot;;[.$D$7]*[.G339])">
            <text:p/>
          </table:table-cell>
          <table:table-cell table:style-name="ce439" table:formula="of:=IF([.C340]&gt;[.$D$9];&quot;&quot;;[.D340]-[.E340])">
            <text:p/>
          </table:table-cell>
          <table:table-cell table:style-name="ce433" table:formula="of:=IF([.C340]&gt;[.$D$9];&quot;&quot;;[.G339]-[.F34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0]=[.$D$9];[.C340]=&quot;&quot;);&quot;&quot;;IF(ISNUMBER([.C340]);[.C340]+1;1))">
            <text:p/>
          </table:table-cell>
          <table:table-cell table:style-name="ce433" table:formula="of:=IF([.C341]&gt;[.$D$9];&quot;&quot;;PMT([.$D$7];[.$D$9];[.$D$3])*-1)">
            <text:p/>
          </table:table-cell>
          <table:table-cell table:style-name="ce433" table:formula="of:=IF([.C341]&gt;[.$D$9];&quot;&quot;;[.$D$7]*[.G340])">
            <text:p/>
          </table:table-cell>
          <table:table-cell table:style-name="ce439" table:formula="of:=IF([.C341]&gt;[.$D$9];&quot;&quot;;[.D341]-[.E341])">
            <text:p/>
          </table:table-cell>
          <table:table-cell table:style-name="ce433" table:formula="of:=IF([.C341]&gt;[.$D$9];&quot;&quot;;[.G340]-[.F34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1]=[.$D$9];[.C341]=&quot;&quot;);&quot;&quot;;IF(ISNUMBER([.C341]);[.C341]+1;1))">
            <text:p/>
          </table:table-cell>
          <table:table-cell table:style-name="ce433" table:formula="of:=IF([.C342]&gt;[.$D$9];&quot;&quot;;PMT([.$D$7];[.$D$9];[.$D$3])*-1)">
            <text:p/>
          </table:table-cell>
          <table:table-cell table:style-name="ce433" table:formula="of:=IF([.C342]&gt;[.$D$9];&quot;&quot;;[.$D$7]*[.G341])">
            <text:p/>
          </table:table-cell>
          <table:table-cell table:style-name="ce439" table:formula="of:=IF([.C342]&gt;[.$D$9];&quot;&quot;;[.D342]-[.E342])">
            <text:p/>
          </table:table-cell>
          <table:table-cell table:style-name="ce433" table:formula="of:=IF([.C342]&gt;[.$D$9];&quot;&quot;;[.G341]-[.F34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2]=[.$D$9];[.C342]=&quot;&quot;);&quot;&quot;;IF(ISNUMBER([.C342]);[.C342]+1;1))">
            <text:p/>
          </table:table-cell>
          <table:table-cell table:style-name="ce433" table:formula="of:=IF([.C343]&gt;[.$D$9];&quot;&quot;;PMT([.$D$7];[.$D$9];[.$D$3])*-1)">
            <text:p/>
          </table:table-cell>
          <table:table-cell table:style-name="ce433" table:formula="of:=IF([.C343]&gt;[.$D$9];&quot;&quot;;[.$D$7]*[.G342])">
            <text:p/>
          </table:table-cell>
          <table:table-cell table:style-name="ce439" table:formula="of:=IF([.C343]&gt;[.$D$9];&quot;&quot;;[.D343]-[.E343])">
            <text:p/>
          </table:table-cell>
          <table:table-cell table:style-name="ce433" table:formula="of:=IF([.C343]&gt;[.$D$9];&quot;&quot;;[.G342]-[.F34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3]=[.$D$9];[.C343]=&quot;&quot;);&quot;&quot;;IF(ISNUMBER([.C343]);[.C343]+1;1))">
            <text:p/>
          </table:table-cell>
          <table:table-cell table:style-name="ce433" table:formula="of:=IF([.C344]&gt;[.$D$9];&quot;&quot;;PMT([.$D$7];[.$D$9];[.$D$3])*-1)">
            <text:p/>
          </table:table-cell>
          <table:table-cell table:style-name="ce433" table:formula="of:=IF([.C344]&gt;[.$D$9];&quot;&quot;;[.$D$7]*[.G343])">
            <text:p/>
          </table:table-cell>
          <table:table-cell table:style-name="ce439" table:formula="of:=IF([.C344]&gt;[.$D$9];&quot;&quot;;[.D344]-[.E344])">
            <text:p/>
          </table:table-cell>
          <table:table-cell table:style-name="ce433" table:formula="of:=IF([.C344]&gt;[.$D$9];&quot;&quot;;[.G343]-[.F34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4]=[.$D$9];[.C344]=&quot;&quot;);&quot;&quot;;IF(ISNUMBER([.C344]);[.C344]+1;1))">
            <text:p/>
          </table:table-cell>
          <table:table-cell table:style-name="ce433" table:formula="of:=IF([.C345]&gt;[.$D$9];&quot;&quot;;PMT([.$D$7];[.$D$9];[.$D$3])*-1)">
            <text:p/>
          </table:table-cell>
          <table:table-cell table:style-name="ce433" table:formula="of:=IF([.C345]&gt;[.$D$9];&quot;&quot;;[.$D$7]*[.G344])">
            <text:p/>
          </table:table-cell>
          <table:table-cell table:style-name="ce439" table:formula="of:=IF([.C345]&gt;[.$D$9];&quot;&quot;;[.D345]-[.E345])">
            <text:p/>
          </table:table-cell>
          <table:table-cell table:style-name="ce433" table:formula="of:=IF([.C345]&gt;[.$D$9];&quot;&quot;;[.G344]-[.F34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5]=[.$D$9];[.C345]=&quot;&quot;);&quot;&quot;;IF(ISNUMBER([.C345]);[.C345]+1;1))">
            <text:p/>
          </table:table-cell>
          <table:table-cell table:style-name="ce433" table:formula="of:=IF([.C346]&gt;[.$D$9];&quot;&quot;;PMT([.$D$7];[.$D$9];[.$D$3])*-1)">
            <text:p/>
          </table:table-cell>
          <table:table-cell table:style-name="ce433" table:formula="of:=IF([.C346]&gt;[.$D$9];&quot;&quot;;[.$D$7]*[.G345])">
            <text:p/>
          </table:table-cell>
          <table:table-cell table:style-name="ce439" table:formula="of:=IF([.C346]&gt;[.$D$9];&quot;&quot;;[.D346]-[.E346])">
            <text:p/>
          </table:table-cell>
          <table:table-cell table:style-name="ce433" table:formula="of:=IF([.C346]&gt;[.$D$9];&quot;&quot;;[.G345]-[.F34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6]=[.$D$9];[.C346]=&quot;&quot;);&quot;&quot;;IF(ISNUMBER([.C346]);[.C346]+1;1))">
            <text:p/>
          </table:table-cell>
          <table:table-cell table:style-name="ce433" table:formula="of:=IF([.C347]&gt;[.$D$9];&quot;&quot;;PMT([.$D$7];[.$D$9];[.$D$3])*-1)">
            <text:p/>
          </table:table-cell>
          <table:table-cell table:style-name="ce433" table:formula="of:=IF([.C347]&gt;[.$D$9];&quot;&quot;;[.$D$7]*[.G346])">
            <text:p/>
          </table:table-cell>
          <table:table-cell table:style-name="ce439" table:formula="of:=IF([.C347]&gt;[.$D$9];&quot;&quot;;[.D347]-[.E347])">
            <text:p/>
          </table:table-cell>
          <table:table-cell table:style-name="ce433" table:formula="of:=IF([.C347]&gt;[.$D$9];&quot;&quot;;[.G346]-[.F34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7]=[.$D$9];[.C347]=&quot;&quot;);&quot;&quot;;IF(ISNUMBER([.C347]);[.C347]+1;1))">
            <text:p/>
          </table:table-cell>
          <table:table-cell table:style-name="ce433" table:formula="of:=IF([.C348]&gt;[.$D$9];&quot;&quot;;PMT([.$D$7];[.$D$9];[.$D$3])*-1)">
            <text:p/>
          </table:table-cell>
          <table:table-cell table:style-name="ce433" table:formula="of:=IF([.C348]&gt;[.$D$9];&quot;&quot;;[.$D$7]*[.G347])">
            <text:p/>
          </table:table-cell>
          <table:table-cell table:style-name="ce439" table:formula="of:=IF([.C348]&gt;[.$D$9];&quot;&quot;;[.D348]-[.E348])">
            <text:p/>
          </table:table-cell>
          <table:table-cell table:style-name="ce433" table:formula="of:=IF([.C348]&gt;[.$D$9];&quot;&quot;;[.G347]-[.F34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8]=[.$D$9];[.C348]=&quot;&quot;);&quot;&quot;;IF(ISNUMBER([.C348]);[.C348]+1;1))">
            <text:p/>
          </table:table-cell>
          <table:table-cell table:style-name="ce433" table:formula="of:=IF([.C349]&gt;[.$D$9];&quot;&quot;;PMT([.$D$7];[.$D$9];[.$D$3])*-1)">
            <text:p/>
          </table:table-cell>
          <table:table-cell table:style-name="ce433" table:formula="of:=IF([.C349]&gt;[.$D$9];&quot;&quot;;[.$D$7]*[.G348])">
            <text:p/>
          </table:table-cell>
          <table:table-cell table:style-name="ce439" table:formula="of:=IF([.C349]&gt;[.$D$9];&quot;&quot;;[.D349]-[.E349])">
            <text:p/>
          </table:table-cell>
          <table:table-cell table:style-name="ce433" table:formula="of:=IF([.C349]&gt;[.$D$9];&quot;&quot;;[.G348]-[.F34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49]=[.$D$9];[.C349]=&quot;&quot;);&quot;&quot;;IF(ISNUMBER([.C349]);[.C349]+1;1))">
            <text:p/>
          </table:table-cell>
          <table:table-cell table:style-name="ce433" table:formula="of:=IF([.C350]&gt;[.$D$9];&quot;&quot;;PMT([.$D$7];[.$D$9];[.$D$3])*-1)">
            <text:p/>
          </table:table-cell>
          <table:table-cell table:style-name="ce433" table:formula="of:=IF([.C350]&gt;[.$D$9];&quot;&quot;;[.$D$7]*[.G349])">
            <text:p/>
          </table:table-cell>
          <table:table-cell table:style-name="ce439" table:formula="of:=IF([.C350]&gt;[.$D$9];&quot;&quot;;[.D350]-[.E350])">
            <text:p/>
          </table:table-cell>
          <table:table-cell table:style-name="ce433" table:formula="of:=IF([.C350]&gt;[.$D$9];&quot;&quot;;[.G349]-[.F35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0]=[.$D$9];[.C350]=&quot;&quot;);&quot;&quot;;IF(ISNUMBER([.C350]);[.C350]+1;1))">
            <text:p/>
          </table:table-cell>
          <table:table-cell table:style-name="ce433" table:formula="of:=IF([.C351]&gt;[.$D$9];&quot;&quot;;PMT([.$D$7];[.$D$9];[.$D$3])*-1)">
            <text:p/>
          </table:table-cell>
          <table:table-cell table:style-name="ce433" table:formula="of:=IF([.C351]&gt;[.$D$9];&quot;&quot;;[.$D$7]*[.G350])">
            <text:p/>
          </table:table-cell>
          <table:table-cell table:style-name="ce439" table:formula="of:=IF([.C351]&gt;[.$D$9];&quot;&quot;;[.D351]-[.E351])">
            <text:p/>
          </table:table-cell>
          <table:table-cell table:style-name="ce433" table:formula="of:=IF([.C351]&gt;[.$D$9];&quot;&quot;;[.G350]-[.F35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1]=[.$D$9];[.C351]=&quot;&quot;);&quot;&quot;;IF(ISNUMBER([.C351]);[.C351]+1;1))">
            <text:p/>
          </table:table-cell>
          <table:table-cell table:style-name="ce433" table:formula="of:=IF([.C352]&gt;[.$D$9];&quot;&quot;;PMT([.$D$7];[.$D$9];[.$D$3])*-1)">
            <text:p/>
          </table:table-cell>
          <table:table-cell table:style-name="ce433" table:formula="of:=IF([.C352]&gt;[.$D$9];&quot;&quot;;[.$D$7]*[.G351])">
            <text:p/>
          </table:table-cell>
          <table:table-cell table:style-name="ce439" table:formula="of:=IF([.C352]&gt;[.$D$9];&quot;&quot;;[.D352]-[.E352])">
            <text:p/>
          </table:table-cell>
          <table:table-cell table:style-name="ce433" table:formula="of:=IF([.C352]&gt;[.$D$9];&quot;&quot;;[.G351]-[.F35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2]=[.$D$9];[.C352]=&quot;&quot;);&quot;&quot;;IF(ISNUMBER([.C352]);[.C352]+1;1))">
            <text:p/>
          </table:table-cell>
          <table:table-cell table:style-name="ce433" table:formula="of:=IF([.C353]&gt;[.$D$9];&quot;&quot;;PMT([.$D$7];[.$D$9];[.$D$3])*-1)">
            <text:p/>
          </table:table-cell>
          <table:table-cell table:style-name="ce433" table:formula="of:=IF([.C353]&gt;[.$D$9];&quot;&quot;;[.$D$7]*[.G352])">
            <text:p/>
          </table:table-cell>
          <table:table-cell table:style-name="ce439" table:formula="of:=IF([.C353]&gt;[.$D$9];&quot;&quot;;[.D353]-[.E353])">
            <text:p/>
          </table:table-cell>
          <table:table-cell table:style-name="ce433" table:formula="of:=IF([.C353]&gt;[.$D$9];&quot;&quot;;[.G352]-[.F35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3]=[.$D$9];[.C353]=&quot;&quot;);&quot;&quot;;IF(ISNUMBER([.C353]);[.C353]+1;1))">
            <text:p/>
          </table:table-cell>
          <table:table-cell table:style-name="ce433" table:formula="of:=IF([.C354]&gt;[.$D$9];&quot;&quot;;PMT([.$D$7];[.$D$9];[.$D$3])*-1)">
            <text:p/>
          </table:table-cell>
          <table:table-cell table:style-name="ce433" table:formula="of:=IF([.C354]&gt;[.$D$9];&quot;&quot;;[.$D$7]*[.G353])">
            <text:p/>
          </table:table-cell>
          <table:table-cell table:style-name="ce439" table:formula="of:=IF([.C354]&gt;[.$D$9];&quot;&quot;;[.D354]-[.E354])">
            <text:p/>
          </table:table-cell>
          <table:table-cell table:style-name="ce433" table:formula="of:=IF([.C354]&gt;[.$D$9];&quot;&quot;;[.G353]-[.F35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4]=[.$D$9];[.C354]=&quot;&quot;);&quot;&quot;;IF(ISNUMBER([.C354]);[.C354]+1;1))">
            <text:p/>
          </table:table-cell>
          <table:table-cell table:style-name="ce433" table:formula="of:=IF([.C355]&gt;[.$D$9];&quot;&quot;;PMT([.$D$7];[.$D$9];[.$D$3])*-1)">
            <text:p/>
          </table:table-cell>
          <table:table-cell table:style-name="ce433" table:formula="of:=IF([.C355]&gt;[.$D$9];&quot;&quot;;[.$D$7]*[.G354])">
            <text:p/>
          </table:table-cell>
          <table:table-cell table:style-name="ce439" table:formula="of:=IF([.C355]&gt;[.$D$9];&quot;&quot;;[.D355]-[.E355])">
            <text:p/>
          </table:table-cell>
          <table:table-cell table:style-name="ce433" table:formula="of:=IF([.C355]&gt;[.$D$9];&quot;&quot;;[.G354]-[.F35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5]=[.$D$9];[.C355]=&quot;&quot;);&quot;&quot;;IF(ISNUMBER([.C355]);[.C355]+1;1))">
            <text:p/>
          </table:table-cell>
          <table:table-cell table:style-name="ce433" table:formula="of:=IF([.C356]&gt;[.$D$9];&quot;&quot;;PMT([.$D$7];[.$D$9];[.$D$3])*-1)">
            <text:p/>
          </table:table-cell>
          <table:table-cell table:style-name="ce433" table:formula="of:=IF([.C356]&gt;[.$D$9];&quot;&quot;;[.$D$7]*[.G355])">
            <text:p/>
          </table:table-cell>
          <table:table-cell table:style-name="ce439" table:formula="of:=IF([.C356]&gt;[.$D$9];&quot;&quot;;[.D356]-[.E356])">
            <text:p/>
          </table:table-cell>
          <table:table-cell table:style-name="ce433" table:formula="of:=IF([.C356]&gt;[.$D$9];&quot;&quot;;[.G355]-[.F35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6]=[.$D$9];[.C356]=&quot;&quot;);&quot;&quot;;IF(ISNUMBER([.C356]);[.C356]+1;1))">
            <text:p/>
          </table:table-cell>
          <table:table-cell table:style-name="ce433" table:formula="of:=IF([.C357]&gt;[.$D$9];&quot;&quot;;PMT([.$D$7];[.$D$9];[.$D$3])*-1)">
            <text:p/>
          </table:table-cell>
          <table:table-cell table:style-name="ce433" table:formula="of:=IF([.C357]&gt;[.$D$9];&quot;&quot;;[.$D$7]*[.G356])">
            <text:p/>
          </table:table-cell>
          <table:table-cell table:style-name="ce439" table:formula="of:=IF([.C357]&gt;[.$D$9];&quot;&quot;;[.D357]-[.E357])">
            <text:p/>
          </table:table-cell>
          <table:table-cell table:style-name="ce433" table:formula="of:=IF([.C357]&gt;[.$D$9];&quot;&quot;;[.G356]-[.F35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7]=[.$D$9];[.C357]=&quot;&quot;);&quot;&quot;;IF(ISNUMBER([.C357]);[.C357]+1;1))">
            <text:p/>
          </table:table-cell>
          <table:table-cell table:style-name="ce433" table:formula="of:=IF([.C358]&gt;[.$D$9];&quot;&quot;;PMT([.$D$7];[.$D$9];[.$D$3])*-1)">
            <text:p/>
          </table:table-cell>
          <table:table-cell table:style-name="ce433" table:formula="of:=IF([.C358]&gt;[.$D$9];&quot;&quot;;[.$D$7]*[.G357])">
            <text:p/>
          </table:table-cell>
          <table:table-cell table:style-name="ce439" table:formula="of:=IF([.C358]&gt;[.$D$9];&quot;&quot;;[.D358]-[.E358])">
            <text:p/>
          </table:table-cell>
          <table:table-cell table:style-name="ce433" table:formula="of:=IF([.C358]&gt;[.$D$9];&quot;&quot;;[.G357]-[.F35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8]=[.$D$9];[.C358]=&quot;&quot;);&quot;&quot;;IF(ISNUMBER([.C358]);[.C358]+1;1))">
            <text:p/>
          </table:table-cell>
          <table:table-cell table:style-name="ce433" table:formula="of:=IF([.C359]&gt;[.$D$9];&quot;&quot;;PMT([.$D$7];[.$D$9];[.$D$3])*-1)">
            <text:p/>
          </table:table-cell>
          <table:table-cell table:style-name="ce433" table:formula="of:=IF([.C359]&gt;[.$D$9];&quot;&quot;;[.$D$7]*[.G358])">
            <text:p/>
          </table:table-cell>
          <table:table-cell table:style-name="ce439" table:formula="of:=IF([.C359]&gt;[.$D$9];&quot;&quot;;[.D359]-[.E359])">
            <text:p/>
          </table:table-cell>
          <table:table-cell table:style-name="ce433" table:formula="of:=IF([.C359]&gt;[.$D$9];&quot;&quot;;[.G358]-[.F35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59]=[.$D$9];[.C359]=&quot;&quot;);&quot;&quot;;IF(ISNUMBER([.C359]);[.C359]+1;1))">
            <text:p/>
          </table:table-cell>
          <table:table-cell table:style-name="ce433" table:formula="of:=IF([.C360]&gt;[.$D$9];&quot;&quot;;PMT([.$D$7];[.$D$9];[.$D$3])*-1)">
            <text:p/>
          </table:table-cell>
          <table:table-cell table:style-name="ce433" table:formula="of:=IF([.C360]&gt;[.$D$9];&quot;&quot;;[.$D$7]*[.G359])">
            <text:p/>
          </table:table-cell>
          <table:table-cell table:style-name="ce439" table:formula="of:=IF([.C360]&gt;[.$D$9];&quot;&quot;;[.D360]-[.E360])">
            <text:p/>
          </table:table-cell>
          <table:table-cell table:style-name="ce433" table:formula="of:=IF([.C360]&gt;[.$D$9];&quot;&quot;;[.G359]-[.F36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0]=[.$D$9];[.C360]=&quot;&quot;);&quot;&quot;;IF(ISNUMBER([.C360]);[.C360]+1;1))">
            <text:p/>
          </table:table-cell>
          <table:table-cell table:style-name="ce433" table:formula="of:=IF([.C361]&gt;[.$D$9];&quot;&quot;;PMT([.$D$7];[.$D$9];[.$D$3])*-1)">
            <text:p/>
          </table:table-cell>
          <table:table-cell table:style-name="ce433" table:formula="of:=IF([.C361]&gt;[.$D$9];&quot;&quot;;[.$D$7]*[.G360])">
            <text:p/>
          </table:table-cell>
          <table:table-cell table:style-name="ce439" table:formula="of:=IF([.C361]&gt;[.$D$9];&quot;&quot;;[.D361]-[.E361])">
            <text:p/>
          </table:table-cell>
          <table:table-cell table:style-name="ce433" table:formula="of:=IF([.C361]&gt;[.$D$9];&quot;&quot;;[.G360]-[.F36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1]=[.$D$9];[.C361]=&quot;&quot;);&quot;&quot;;IF(ISNUMBER([.C361]);[.C361]+1;1))">
            <text:p/>
          </table:table-cell>
          <table:table-cell table:style-name="ce433" table:formula="of:=IF([.C362]&gt;[.$D$9];&quot;&quot;;PMT([.$D$7];[.$D$9];[.$D$3])*-1)">
            <text:p/>
          </table:table-cell>
          <table:table-cell table:style-name="ce433" table:formula="of:=IF([.C362]&gt;[.$D$9];&quot;&quot;;[.$D$7]*[.G361])">
            <text:p/>
          </table:table-cell>
          <table:table-cell table:style-name="ce439" table:formula="of:=IF([.C362]&gt;[.$D$9];&quot;&quot;;[.D362]-[.E362])">
            <text:p/>
          </table:table-cell>
          <table:table-cell table:style-name="ce433" table:formula="of:=IF([.C362]&gt;[.$D$9];&quot;&quot;;[.G361]-[.F36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2]=[.$D$9];[.C362]=&quot;&quot;);&quot;&quot;;IF(ISNUMBER([.C362]);[.C362]+1;1))">
            <text:p/>
          </table:table-cell>
          <table:table-cell table:style-name="ce433" table:formula="of:=IF([.C363]&gt;[.$D$9];&quot;&quot;;PMT([.$D$7];[.$D$9];[.$D$3])*-1)">
            <text:p/>
          </table:table-cell>
          <table:table-cell table:style-name="ce433" table:formula="of:=IF([.C363]&gt;[.$D$9];&quot;&quot;;[.$D$7]*[.G362])">
            <text:p/>
          </table:table-cell>
          <table:table-cell table:style-name="ce439" table:formula="of:=IF([.C363]&gt;[.$D$9];&quot;&quot;;[.D363]-[.E363])">
            <text:p/>
          </table:table-cell>
          <table:table-cell table:style-name="ce433" table:formula="of:=IF([.C363]&gt;[.$D$9];&quot;&quot;;[.G362]-[.F36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3]=[.$D$9];[.C363]=&quot;&quot;);&quot;&quot;;IF(ISNUMBER([.C363]);[.C363]+1;1))">
            <text:p/>
          </table:table-cell>
          <table:table-cell table:style-name="ce433" table:formula="of:=IF([.C364]&gt;[.$D$9];&quot;&quot;;PMT([.$D$7];[.$D$9];[.$D$3])*-1)">
            <text:p/>
          </table:table-cell>
          <table:table-cell table:style-name="ce433" table:formula="of:=IF([.C364]&gt;[.$D$9];&quot;&quot;;[.$D$7]*[.G363])">
            <text:p/>
          </table:table-cell>
          <table:table-cell table:style-name="ce439" table:formula="of:=IF([.C364]&gt;[.$D$9];&quot;&quot;;[.D364]-[.E364])">
            <text:p/>
          </table:table-cell>
          <table:table-cell table:style-name="ce433" table:formula="of:=IF([.C364]&gt;[.$D$9];&quot;&quot;;[.G363]-[.F36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4]=[.$D$9];[.C364]=&quot;&quot;);&quot;&quot;;IF(ISNUMBER([.C364]);[.C364]+1;1))">
            <text:p/>
          </table:table-cell>
          <table:table-cell table:style-name="ce433" table:formula="of:=IF([.C365]&gt;[.$D$9];&quot;&quot;;PMT([.$D$7];[.$D$9];[.$D$3])*-1)">
            <text:p/>
          </table:table-cell>
          <table:table-cell table:style-name="ce433" table:formula="of:=IF([.C365]&gt;[.$D$9];&quot;&quot;;[.$D$7]*[.G364])">
            <text:p/>
          </table:table-cell>
          <table:table-cell table:style-name="ce439" table:formula="of:=IF([.C365]&gt;[.$D$9];&quot;&quot;;[.D365]-[.E365])">
            <text:p/>
          </table:table-cell>
          <table:table-cell table:style-name="ce433" table:formula="of:=IF([.C365]&gt;[.$D$9];&quot;&quot;;[.G364]-[.F36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5]=[.$D$9];[.C365]=&quot;&quot;);&quot;&quot;;IF(ISNUMBER([.C365]);[.C365]+1;1))">
            <text:p/>
          </table:table-cell>
          <table:table-cell table:style-name="ce433" table:formula="of:=IF([.C366]&gt;[.$D$9];&quot;&quot;;PMT([.$D$7];[.$D$9];[.$D$3])*-1)">
            <text:p/>
          </table:table-cell>
          <table:table-cell table:style-name="ce433" table:formula="of:=IF([.C366]&gt;[.$D$9];&quot;&quot;;[.$D$7]*[.G365])">
            <text:p/>
          </table:table-cell>
          <table:table-cell table:style-name="ce439" table:formula="of:=IF([.C366]&gt;[.$D$9];&quot;&quot;;[.D366]-[.E366])">
            <text:p/>
          </table:table-cell>
          <table:table-cell table:style-name="ce433" table:formula="of:=IF([.C366]&gt;[.$D$9];&quot;&quot;;[.G365]-[.F36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6]=[.$D$9];[.C366]=&quot;&quot;);&quot;&quot;;IF(ISNUMBER([.C366]);[.C366]+1;1))">
            <text:p/>
          </table:table-cell>
          <table:table-cell table:style-name="ce433" table:formula="of:=IF([.C367]&gt;[.$D$9];&quot;&quot;;PMT([.$D$7];[.$D$9];[.$D$3])*-1)">
            <text:p/>
          </table:table-cell>
          <table:table-cell table:style-name="ce433" table:formula="of:=IF([.C367]&gt;[.$D$9];&quot;&quot;;[.$D$7]*[.G366])">
            <text:p/>
          </table:table-cell>
          <table:table-cell table:style-name="ce439" table:formula="of:=IF([.C367]&gt;[.$D$9];&quot;&quot;;[.D367]-[.E367])">
            <text:p/>
          </table:table-cell>
          <table:table-cell table:style-name="ce433" table:formula="of:=IF([.C367]&gt;[.$D$9];&quot;&quot;;[.G366]-[.F36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7]=[.$D$9];[.C367]=&quot;&quot;);&quot;&quot;;IF(ISNUMBER([.C367]);[.C367]+1;1))">
            <text:p/>
          </table:table-cell>
          <table:table-cell table:style-name="ce433" table:formula="of:=IF([.C368]&gt;[.$D$9];&quot;&quot;;PMT([.$D$7];[.$D$9];[.$D$3])*-1)">
            <text:p/>
          </table:table-cell>
          <table:table-cell table:style-name="ce433" table:formula="of:=IF([.C368]&gt;[.$D$9];&quot;&quot;;[.$D$7]*[.G367])">
            <text:p/>
          </table:table-cell>
          <table:table-cell table:style-name="ce439" table:formula="of:=IF([.C368]&gt;[.$D$9];&quot;&quot;;[.D368]-[.E368])">
            <text:p/>
          </table:table-cell>
          <table:table-cell table:style-name="ce433" table:formula="of:=IF([.C368]&gt;[.$D$9];&quot;&quot;;[.G367]-[.F36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8]=[.$D$9];[.C368]=&quot;&quot;);&quot;&quot;;IF(ISNUMBER([.C368]);[.C368]+1;1))">
            <text:p/>
          </table:table-cell>
          <table:table-cell table:style-name="ce433" table:formula="of:=IF([.C369]&gt;[.$D$9];&quot;&quot;;PMT([.$D$7];[.$D$9];[.$D$3])*-1)">
            <text:p/>
          </table:table-cell>
          <table:table-cell table:style-name="ce433" table:formula="of:=IF([.C369]&gt;[.$D$9];&quot;&quot;;[.$D$7]*[.G368])">
            <text:p/>
          </table:table-cell>
          <table:table-cell table:style-name="ce439" table:formula="of:=IF([.C369]&gt;[.$D$9];&quot;&quot;;[.D369]-[.E369])">
            <text:p/>
          </table:table-cell>
          <table:table-cell table:style-name="ce433" table:formula="of:=IF([.C369]&gt;[.$D$9];&quot;&quot;;[.G368]-[.F36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69]=[.$D$9];[.C369]=&quot;&quot;);&quot;&quot;;IF(ISNUMBER([.C369]);[.C369]+1;1))">
            <text:p/>
          </table:table-cell>
          <table:table-cell table:style-name="ce433" table:formula="of:=IF([.C370]&gt;[.$D$9];&quot;&quot;;PMT([.$D$7];[.$D$9];[.$D$3])*-1)">
            <text:p/>
          </table:table-cell>
          <table:table-cell table:style-name="ce433" table:formula="of:=IF([.C370]&gt;[.$D$9];&quot;&quot;;[.$D$7]*[.G369])">
            <text:p/>
          </table:table-cell>
          <table:table-cell table:style-name="ce439" table:formula="of:=IF([.C370]&gt;[.$D$9];&quot;&quot;;[.D370]-[.E370])">
            <text:p/>
          </table:table-cell>
          <table:table-cell table:style-name="ce433" table:formula="of:=IF([.C370]&gt;[.$D$9];&quot;&quot;;[.G369]-[.F37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0]=[.$D$9];[.C370]=&quot;&quot;);&quot;&quot;;IF(ISNUMBER([.C370]);[.C370]+1;1))">
            <text:p/>
          </table:table-cell>
          <table:table-cell table:style-name="ce433" table:formula="of:=IF([.C371]&gt;[.$D$9];&quot;&quot;;PMT([.$D$7];[.$D$9];[.$D$3])*-1)">
            <text:p/>
          </table:table-cell>
          <table:table-cell table:style-name="ce433" table:formula="of:=IF([.C371]&gt;[.$D$9];&quot;&quot;;[.$D$7]*[.G370])">
            <text:p/>
          </table:table-cell>
          <table:table-cell table:style-name="ce439" table:formula="of:=IF([.C371]&gt;[.$D$9];&quot;&quot;;[.D371]-[.E371])">
            <text:p/>
          </table:table-cell>
          <table:table-cell table:style-name="ce433" table:formula="of:=IF([.C371]&gt;[.$D$9];&quot;&quot;;[.G370]-[.F37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1]=[.$D$9];[.C371]=&quot;&quot;);&quot;&quot;;IF(ISNUMBER([.C371]);[.C371]+1;1))">
            <text:p/>
          </table:table-cell>
          <table:table-cell table:style-name="ce433" table:formula="of:=IF([.C372]&gt;[.$D$9];&quot;&quot;;PMT([.$D$7];[.$D$9];[.$D$3])*-1)">
            <text:p/>
          </table:table-cell>
          <table:table-cell table:style-name="ce433" table:formula="of:=IF([.C372]&gt;[.$D$9];&quot;&quot;;[.$D$7]*[.G371])">
            <text:p/>
          </table:table-cell>
          <table:table-cell table:style-name="ce439" table:formula="of:=IF([.C372]&gt;[.$D$9];&quot;&quot;;[.D372]-[.E372])">
            <text:p/>
          </table:table-cell>
          <table:table-cell table:style-name="ce433" table:formula="of:=IF([.C372]&gt;[.$D$9];&quot;&quot;;[.G371]-[.F37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2]=[.$D$9];[.C372]=&quot;&quot;);&quot;&quot;;IF(ISNUMBER([.C372]);[.C372]+1;1))">
            <text:p/>
          </table:table-cell>
          <table:table-cell table:style-name="ce433" table:formula="of:=IF([.C373]&gt;[.$D$9];&quot;&quot;;PMT([.$D$7];[.$D$9];[.$D$3])*-1)">
            <text:p/>
          </table:table-cell>
          <table:table-cell table:style-name="ce433" table:formula="of:=IF([.C373]&gt;[.$D$9];&quot;&quot;;[.$D$7]*[.G372])">
            <text:p/>
          </table:table-cell>
          <table:table-cell table:style-name="ce439" table:formula="of:=IF([.C373]&gt;[.$D$9];&quot;&quot;;[.D373]-[.E373])">
            <text:p/>
          </table:table-cell>
          <table:table-cell table:style-name="ce433" table:formula="of:=IF([.C373]&gt;[.$D$9];&quot;&quot;;[.G372]-[.F37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3]=[.$D$9];[.C373]=&quot;&quot;);&quot;&quot;;IF(ISNUMBER([.C373]);[.C373]+1;1))">
            <text:p/>
          </table:table-cell>
          <table:table-cell table:style-name="ce433" table:formula="of:=IF([.C374]&gt;[.$D$9];&quot;&quot;;PMT([.$D$7];[.$D$9];[.$D$3])*-1)">
            <text:p/>
          </table:table-cell>
          <table:table-cell table:style-name="ce433" table:formula="of:=IF([.C374]&gt;[.$D$9];&quot;&quot;;[.$D$7]*[.G373])">
            <text:p/>
          </table:table-cell>
          <table:table-cell table:style-name="ce439" table:formula="of:=IF([.C374]&gt;[.$D$9];&quot;&quot;;[.D374]-[.E374])">
            <text:p/>
          </table:table-cell>
          <table:table-cell table:style-name="ce433" table:formula="of:=IF([.C374]&gt;[.$D$9];&quot;&quot;;[.G373]-[.F37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4]=[.$D$9];[.C374]=&quot;&quot;);&quot;&quot;;IF(ISNUMBER([.C374]);[.C374]+1;1))">
            <text:p/>
          </table:table-cell>
          <table:table-cell table:style-name="ce433" table:formula="of:=IF([.C375]&gt;[.$D$9];&quot;&quot;;PMT([.$D$7];[.$D$9];[.$D$3])*-1)">
            <text:p/>
          </table:table-cell>
          <table:table-cell table:style-name="ce433" table:formula="of:=IF([.C375]&gt;[.$D$9];&quot;&quot;;[.$D$7]*[.G374])">
            <text:p/>
          </table:table-cell>
          <table:table-cell table:style-name="ce439" table:formula="of:=IF([.C375]&gt;[.$D$9];&quot;&quot;;[.D375]-[.E375])">
            <text:p/>
          </table:table-cell>
          <table:table-cell table:style-name="ce433" table:formula="of:=IF([.C375]&gt;[.$D$9];&quot;&quot;;[.G374]-[.F37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5]=[.$D$9];[.C375]=&quot;&quot;);&quot;&quot;;IF(ISNUMBER([.C375]);[.C375]+1;1))">
            <text:p/>
          </table:table-cell>
          <table:table-cell table:style-name="ce433" table:formula="of:=IF([.C376]&gt;[.$D$9];&quot;&quot;;PMT([.$D$7];[.$D$9];[.$D$3])*-1)">
            <text:p/>
          </table:table-cell>
          <table:table-cell table:style-name="ce433" table:formula="of:=IF([.C376]&gt;[.$D$9];&quot;&quot;;[.$D$7]*[.G375])">
            <text:p/>
          </table:table-cell>
          <table:table-cell table:style-name="ce439" table:formula="of:=IF([.C376]&gt;[.$D$9];&quot;&quot;;[.D376]-[.E376])">
            <text:p/>
          </table:table-cell>
          <table:table-cell table:style-name="ce433" table:formula="of:=IF([.C376]&gt;[.$D$9];&quot;&quot;;[.G375]-[.F37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6]=[.$D$9];[.C376]=&quot;&quot;);&quot;&quot;;IF(ISNUMBER([.C376]);[.C376]+1;1))">
            <text:p/>
          </table:table-cell>
          <table:table-cell table:style-name="ce433" table:formula="of:=IF([.C377]&gt;[.$D$9];&quot;&quot;;PMT([.$D$7];[.$D$9];[.$D$3])*-1)">
            <text:p/>
          </table:table-cell>
          <table:table-cell table:style-name="ce433" table:formula="of:=IF([.C377]&gt;[.$D$9];&quot;&quot;;[.$D$7]*[.G376])">
            <text:p/>
          </table:table-cell>
          <table:table-cell table:style-name="ce439" table:formula="of:=IF([.C377]&gt;[.$D$9];&quot;&quot;;[.D377]-[.E377])">
            <text:p/>
          </table:table-cell>
          <table:table-cell table:style-name="ce433" table:formula="of:=IF([.C377]&gt;[.$D$9];&quot;&quot;;[.G376]-[.F37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7]=[.$D$9];[.C377]=&quot;&quot;);&quot;&quot;;IF(ISNUMBER([.C377]);[.C377]+1;1))">
            <text:p/>
          </table:table-cell>
          <table:table-cell table:style-name="ce433" table:formula="of:=IF([.C378]&gt;[.$D$9];&quot;&quot;;PMT([.$D$7];[.$D$9];[.$D$3])*-1)">
            <text:p/>
          </table:table-cell>
          <table:table-cell table:style-name="ce433" table:formula="of:=IF([.C378]&gt;[.$D$9];&quot;&quot;;[.$D$7]*[.G377])">
            <text:p/>
          </table:table-cell>
          <table:table-cell table:style-name="ce439" table:formula="of:=IF([.C378]&gt;[.$D$9];&quot;&quot;;[.D378]-[.E378])">
            <text:p/>
          </table:table-cell>
          <table:table-cell table:style-name="ce433" table:formula="of:=IF([.C378]&gt;[.$D$9];&quot;&quot;;[.G377]-[.F37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8]=[.$D$9];[.C378]=&quot;&quot;);&quot;&quot;;IF(ISNUMBER([.C378]);[.C378]+1;1))">
            <text:p/>
          </table:table-cell>
          <table:table-cell table:style-name="ce433" table:formula="of:=IF([.C379]&gt;[.$D$9];&quot;&quot;;PMT([.$D$7];[.$D$9];[.$D$3])*-1)">
            <text:p/>
          </table:table-cell>
          <table:table-cell table:style-name="ce433" table:formula="of:=IF([.C379]&gt;[.$D$9];&quot;&quot;;[.$D$7]*[.G378])">
            <text:p/>
          </table:table-cell>
          <table:table-cell table:style-name="ce439" table:formula="of:=IF([.C379]&gt;[.$D$9];&quot;&quot;;[.D379]-[.E379])">
            <text:p/>
          </table:table-cell>
          <table:table-cell table:style-name="ce433" table:formula="of:=IF([.C379]&gt;[.$D$9];&quot;&quot;;[.G378]-[.F37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79]=[.$D$9];[.C379]=&quot;&quot;);&quot;&quot;;IF(ISNUMBER([.C379]);[.C379]+1;1))">
            <text:p/>
          </table:table-cell>
          <table:table-cell table:style-name="ce433" table:formula="of:=IF([.C380]&gt;[.$D$9];&quot;&quot;;PMT([.$D$7];[.$D$9];[.$D$3])*-1)">
            <text:p/>
          </table:table-cell>
          <table:table-cell table:style-name="ce433" table:formula="of:=IF([.C380]&gt;[.$D$9];&quot;&quot;;[.$D$7]*[.G379])">
            <text:p/>
          </table:table-cell>
          <table:table-cell table:style-name="ce439" table:formula="of:=IF([.C380]&gt;[.$D$9];&quot;&quot;;[.D380]-[.E380])">
            <text:p/>
          </table:table-cell>
          <table:table-cell table:style-name="ce433" table:formula="of:=IF([.C380]&gt;[.$D$9];&quot;&quot;;[.G379]-[.F38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0]=[.$D$9];[.C380]=&quot;&quot;);&quot;&quot;;IF(ISNUMBER([.C380]);[.C380]+1;1))">
            <text:p/>
          </table:table-cell>
          <table:table-cell table:style-name="ce433" table:formula="of:=IF([.C381]&gt;[.$D$9];&quot;&quot;;PMT([.$D$7];[.$D$9];[.$D$3])*-1)">
            <text:p/>
          </table:table-cell>
          <table:table-cell table:style-name="ce433" table:formula="of:=IF([.C381]&gt;[.$D$9];&quot;&quot;;[.$D$7]*[.G380])">
            <text:p/>
          </table:table-cell>
          <table:table-cell table:style-name="ce439" table:formula="of:=IF([.C381]&gt;[.$D$9];&quot;&quot;;[.D381]-[.E381])">
            <text:p/>
          </table:table-cell>
          <table:table-cell table:style-name="ce433" table:formula="of:=IF([.C381]&gt;[.$D$9];&quot;&quot;;[.G380]-[.F38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1]=[.$D$9];[.C381]=&quot;&quot;);&quot;&quot;;IF(ISNUMBER([.C381]);[.C381]+1;1))">
            <text:p/>
          </table:table-cell>
          <table:table-cell table:style-name="ce433" table:formula="of:=IF([.C382]&gt;[.$D$9];&quot;&quot;;PMT([.$D$7];[.$D$9];[.$D$3])*-1)">
            <text:p/>
          </table:table-cell>
          <table:table-cell table:style-name="ce433" table:formula="of:=IF([.C382]&gt;[.$D$9];&quot;&quot;;[.$D$7]*[.G381])">
            <text:p/>
          </table:table-cell>
          <table:table-cell table:style-name="ce439" table:formula="of:=IF([.C382]&gt;[.$D$9];&quot;&quot;;[.D382]-[.E382])">
            <text:p/>
          </table:table-cell>
          <table:table-cell table:style-name="ce433" table:formula="of:=IF([.C382]&gt;[.$D$9];&quot;&quot;;[.G381]-[.F38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2]=[.$D$9];[.C382]=&quot;&quot;);&quot;&quot;;IF(ISNUMBER([.C382]);[.C382]+1;1))">
            <text:p/>
          </table:table-cell>
          <table:table-cell table:style-name="ce433" table:formula="of:=IF([.C383]&gt;[.$D$9];&quot;&quot;;PMT([.$D$7];[.$D$9];[.$D$3])*-1)">
            <text:p/>
          </table:table-cell>
          <table:table-cell table:style-name="ce433" table:formula="of:=IF([.C383]&gt;[.$D$9];&quot;&quot;;[.$D$7]*[.G382])">
            <text:p/>
          </table:table-cell>
          <table:table-cell table:style-name="ce439" table:formula="of:=IF([.C383]&gt;[.$D$9];&quot;&quot;;[.D383]-[.E383])">
            <text:p/>
          </table:table-cell>
          <table:table-cell table:style-name="ce433" table:formula="of:=IF([.C383]&gt;[.$D$9];&quot;&quot;;[.G382]-[.F38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3]=[.$D$9];[.C383]=&quot;&quot;);&quot;&quot;;IF(ISNUMBER([.C383]);[.C383]+1;1))">
            <text:p/>
          </table:table-cell>
          <table:table-cell table:style-name="ce433" table:formula="of:=IF([.C384]&gt;[.$D$9];&quot;&quot;;PMT([.$D$7];[.$D$9];[.$D$3])*-1)">
            <text:p/>
          </table:table-cell>
          <table:table-cell table:style-name="ce433" table:formula="of:=IF([.C384]&gt;[.$D$9];&quot;&quot;;[.$D$7]*[.G383])">
            <text:p/>
          </table:table-cell>
          <table:table-cell table:style-name="ce439" table:formula="of:=IF([.C384]&gt;[.$D$9];&quot;&quot;;[.D384]-[.E384])">
            <text:p/>
          </table:table-cell>
          <table:table-cell table:style-name="ce433" table:formula="of:=IF([.C384]&gt;[.$D$9];&quot;&quot;;[.G383]-[.F38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4]=[.$D$9];[.C384]=&quot;&quot;);&quot;&quot;;IF(ISNUMBER([.C384]);[.C384]+1;1))">
            <text:p/>
          </table:table-cell>
          <table:table-cell table:style-name="ce433" table:formula="of:=IF([.C385]&gt;[.$D$9];&quot;&quot;;PMT([.$D$7];[.$D$9];[.$D$3])*-1)">
            <text:p/>
          </table:table-cell>
          <table:table-cell table:style-name="ce433" table:formula="of:=IF([.C385]&gt;[.$D$9];&quot;&quot;;[.$D$7]*[.G384])">
            <text:p/>
          </table:table-cell>
          <table:table-cell table:style-name="ce439" table:formula="of:=IF([.C385]&gt;[.$D$9];&quot;&quot;;[.D385]-[.E385])">
            <text:p/>
          </table:table-cell>
          <table:table-cell table:style-name="ce433" table:formula="of:=IF([.C385]&gt;[.$D$9];&quot;&quot;;[.G384]-[.F38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5]=[.$D$9];[.C385]=&quot;&quot;);&quot;&quot;;IF(ISNUMBER([.C385]);[.C385]+1;1))">
            <text:p/>
          </table:table-cell>
          <table:table-cell table:style-name="ce433" table:formula="of:=IF([.C386]&gt;[.$D$9];&quot;&quot;;PMT([.$D$7];[.$D$9];[.$D$3])*-1)">
            <text:p/>
          </table:table-cell>
          <table:table-cell table:style-name="ce433" table:formula="of:=IF([.C386]&gt;[.$D$9];&quot;&quot;;[.$D$7]*[.G385])">
            <text:p/>
          </table:table-cell>
          <table:table-cell table:style-name="ce439" table:formula="of:=IF([.C386]&gt;[.$D$9];&quot;&quot;;[.D386]-[.E386])">
            <text:p/>
          </table:table-cell>
          <table:table-cell table:style-name="ce433" table:formula="of:=IF([.C386]&gt;[.$D$9];&quot;&quot;;[.G385]-[.F38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6]=[.$D$9];[.C386]=&quot;&quot;);&quot;&quot;;IF(ISNUMBER([.C386]);[.C386]+1;1))">
            <text:p/>
          </table:table-cell>
          <table:table-cell table:style-name="ce433" table:formula="of:=IF([.C387]&gt;[.$D$9];&quot;&quot;;PMT([.$D$7];[.$D$9];[.$D$3])*-1)">
            <text:p/>
          </table:table-cell>
          <table:table-cell table:style-name="ce433" table:formula="of:=IF([.C387]&gt;[.$D$9];&quot;&quot;;[.$D$7]*[.G386])">
            <text:p/>
          </table:table-cell>
          <table:table-cell table:style-name="ce439" table:formula="of:=IF([.C387]&gt;[.$D$9];&quot;&quot;;[.D387]-[.E387])">
            <text:p/>
          </table:table-cell>
          <table:table-cell table:style-name="ce433" table:formula="of:=IF([.C387]&gt;[.$D$9];&quot;&quot;;[.G386]-[.F38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7]=[.$D$9];[.C387]=&quot;&quot;);&quot;&quot;;IF(ISNUMBER([.C387]);[.C387]+1;1))">
            <text:p/>
          </table:table-cell>
          <table:table-cell table:style-name="ce433" table:formula="of:=IF([.C388]&gt;[.$D$9];&quot;&quot;;PMT([.$D$7];[.$D$9];[.$D$3])*-1)">
            <text:p/>
          </table:table-cell>
          <table:table-cell table:style-name="ce433" table:formula="of:=IF([.C388]&gt;[.$D$9];&quot;&quot;;[.$D$7]*[.G387])">
            <text:p/>
          </table:table-cell>
          <table:table-cell table:style-name="ce439" table:formula="of:=IF([.C388]&gt;[.$D$9];&quot;&quot;;[.D388]-[.E388])">
            <text:p/>
          </table:table-cell>
          <table:table-cell table:style-name="ce433" table:formula="of:=IF([.C388]&gt;[.$D$9];&quot;&quot;;[.G387]-[.F38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8]=[.$D$9];[.C388]=&quot;&quot;);&quot;&quot;;IF(ISNUMBER([.C388]);[.C388]+1;1))">
            <text:p/>
          </table:table-cell>
          <table:table-cell table:style-name="ce433" table:formula="of:=IF([.C389]&gt;[.$D$9];&quot;&quot;;PMT([.$D$7];[.$D$9];[.$D$3])*-1)">
            <text:p/>
          </table:table-cell>
          <table:table-cell table:style-name="ce433" table:formula="of:=IF([.C389]&gt;[.$D$9];&quot;&quot;;[.$D$7]*[.G388])">
            <text:p/>
          </table:table-cell>
          <table:table-cell table:style-name="ce439" table:formula="of:=IF([.C389]&gt;[.$D$9];&quot;&quot;;[.D389]-[.E389])">
            <text:p/>
          </table:table-cell>
          <table:table-cell table:style-name="ce433" table:formula="of:=IF([.C389]&gt;[.$D$9];&quot;&quot;;[.G388]-[.F38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89]=[.$D$9];[.C389]=&quot;&quot;);&quot;&quot;;IF(ISNUMBER([.C389]);[.C389]+1;1))">
            <text:p/>
          </table:table-cell>
          <table:table-cell table:style-name="ce433" table:formula="of:=IF([.C390]&gt;[.$D$9];&quot;&quot;;PMT([.$D$7];[.$D$9];[.$D$3])*-1)">
            <text:p/>
          </table:table-cell>
          <table:table-cell table:style-name="ce433" table:formula="of:=IF([.C390]&gt;[.$D$9];&quot;&quot;;[.$D$7]*[.G389])">
            <text:p/>
          </table:table-cell>
          <table:table-cell table:style-name="ce439" table:formula="of:=IF([.C390]&gt;[.$D$9];&quot;&quot;;[.D390]-[.E390])">
            <text:p/>
          </table:table-cell>
          <table:table-cell table:style-name="ce433" table:formula="of:=IF([.C390]&gt;[.$D$9];&quot;&quot;;[.G389]-[.F390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0]=[.$D$9];[.C390]=&quot;&quot;);&quot;&quot;;IF(ISNUMBER([.C390]);[.C390]+1;1))">
            <text:p/>
          </table:table-cell>
          <table:table-cell table:style-name="ce433" table:formula="of:=IF([.C391]&gt;[.$D$9];&quot;&quot;;PMT([.$D$7];[.$D$9];[.$D$3])*-1)">
            <text:p/>
          </table:table-cell>
          <table:table-cell table:style-name="ce433" table:formula="of:=IF([.C391]&gt;[.$D$9];&quot;&quot;;[.$D$7]*[.G390])">
            <text:p/>
          </table:table-cell>
          <table:table-cell table:style-name="ce439" table:formula="of:=IF([.C391]&gt;[.$D$9];&quot;&quot;;[.D391]-[.E391])">
            <text:p/>
          </table:table-cell>
          <table:table-cell table:style-name="ce433" table:formula="of:=IF([.C391]&gt;[.$D$9];&quot;&quot;;[.G390]-[.F391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1]=[.$D$9];[.C391]=&quot;&quot;);&quot;&quot;;IF(ISNUMBER([.C391]);[.C391]+1;1))">
            <text:p/>
          </table:table-cell>
          <table:table-cell table:style-name="ce433" table:formula="of:=IF([.C392]&gt;[.$D$9];&quot;&quot;;PMT([.$D$7];[.$D$9];[.$D$3])*-1)">
            <text:p/>
          </table:table-cell>
          <table:table-cell table:style-name="ce433" table:formula="of:=IF([.C392]&gt;[.$D$9];&quot;&quot;;[.$D$7]*[.G391])">
            <text:p/>
          </table:table-cell>
          <table:table-cell table:style-name="ce439" table:formula="of:=IF([.C392]&gt;[.$D$9];&quot;&quot;;[.D392]-[.E392])">
            <text:p/>
          </table:table-cell>
          <table:table-cell table:style-name="ce433" table:formula="of:=IF([.C392]&gt;[.$D$9];&quot;&quot;;[.G391]-[.F392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2]=[.$D$9];[.C392]=&quot;&quot;);&quot;&quot;;IF(ISNUMBER([.C392]);[.C392]+1;1))">
            <text:p/>
          </table:table-cell>
          <table:table-cell table:style-name="ce433" table:formula="of:=IF([.C393]&gt;[.$D$9];&quot;&quot;;PMT([.$D$7];[.$D$9];[.$D$3])*-1)">
            <text:p/>
          </table:table-cell>
          <table:table-cell table:style-name="ce433" table:formula="of:=IF([.C393]&gt;[.$D$9];&quot;&quot;;[.$D$7]*[.G392])">
            <text:p/>
          </table:table-cell>
          <table:table-cell table:style-name="ce439" table:formula="of:=IF([.C393]&gt;[.$D$9];&quot;&quot;;[.D393]-[.E393])">
            <text:p/>
          </table:table-cell>
          <table:table-cell table:style-name="ce433" table:formula="of:=IF([.C393]&gt;[.$D$9];&quot;&quot;;[.G392]-[.F393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3]=[.$D$9];[.C393]=&quot;&quot;);&quot;&quot;;IF(ISNUMBER([.C393]);[.C393]+1;1))">
            <text:p/>
          </table:table-cell>
          <table:table-cell table:style-name="ce433" table:formula="of:=IF([.C394]&gt;[.$D$9];&quot;&quot;;PMT([.$D$7];[.$D$9];[.$D$3])*-1)">
            <text:p/>
          </table:table-cell>
          <table:table-cell table:style-name="ce433" table:formula="of:=IF([.C394]&gt;[.$D$9];&quot;&quot;;[.$D$7]*[.G393])">
            <text:p/>
          </table:table-cell>
          <table:table-cell table:style-name="ce439" table:formula="of:=IF([.C394]&gt;[.$D$9];&quot;&quot;;[.D394]-[.E394])">
            <text:p/>
          </table:table-cell>
          <table:table-cell table:style-name="ce433" table:formula="of:=IF([.C394]&gt;[.$D$9];&quot;&quot;;[.G393]-[.F394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4]=[.$D$9];[.C394]=&quot;&quot;);&quot;&quot;;IF(ISNUMBER([.C394]);[.C394]+1;1))">
            <text:p/>
          </table:table-cell>
          <table:table-cell table:style-name="ce433" table:formula="of:=IF([.C395]&gt;[.$D$9];&quot;&quot;;PMT([.$D$7];[.$D$9];[.$D$3])*-1)">
            <text:p/>
          </table:table-cell>
          <table:table-cell table:style-name="ce433" table:formula="of:=IF([.C395]&gt;[.$D$9];&quot;&quot;;[.$D$7]*[.G394])">
            <text:p/>
          </table:table-cell>
          <table:table-cell table:style-name="ce439" table:formula="of:=IF([.C395]&gt;[.$D$9];&quot;&quot;;[.D395]-[.E395])">
            <text:p/>
          </table:table-cell>
          <table:table-cell table:style-name="ce433" table:formula="of:=IF([.C395]&gt;[.$D$9];&quot;&quot;;[.G394]-[.F395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5]=[.$D$9];[.C395]=&quot;&quot;);&quot;&quot;;IF(ISNUMBER([.C395]);[.C395]+1;1))">
            <text:p/>
          </table:table-cell>
          <table:table-cell table:style-name="ce433" table:formula="of:=IF([.C396]&gt;[.$D$9];&quot;&quot;;PMT([.$D$7];[.$D$9];[.$D$3])*-1)">
            <text:p/>
          </table:table-cell>
          <table:table-cell table:style-name="ce433" table:formula="of:=IF([.C396]&gt;[.$D$9];&quot;&quot;;[.$D$7]*[.G395])">
            <text:p/>
          </table:table-cell>
          <table:table-cell table:style-name="ce439" table:formula="of:=IF([.C396]&gt;[.$D$9];&quot;&quot;;[.D396]-[.E396])">
            <text:p/>
          </table:table-cell>
          <table:table-cell table:style-name="ce433" table:formula="of:=IF([.C396]&gt;[.$D$9];&quot;&quot;;[.G395]-[.F396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6]=[.$D$9];[.C396]=&quot;&quot;);&quot;&quot;;IF(ISNUMBER([.C396]);[.C396]+1;1))">
            <text:p/>
          </table:table-cell>
          <table:table-cell table:style-name="ce433" table:formula="of:=IF([.C397]&gt;[.$D$9];&quot;&quot;;PMT([.$D$7];[.$D$9];[.$D$3])*-1)">
            <text:p/>
          </table:table-cell>
          <table:table-cell table:style-name="ce433" table:formula="of:=IF([.C397]&gt;[.$D$9];&quot;&quot;;[.$D$7]*[.G396])">
            <text:p/>
          </table:table-cell>
          <table:table-cell table:style-name="ce439" table:formula="of:=IF([.C397]&gt;[.$D$9];&quot;&quot;;[.D397]-[.E397])">
            <text:p/>
          </table:table-cell>
          <table:table-cell table:style-name="ce433" table:formula="of:=IF([.C397]&gt;[.$D$9];&quot;&quot;;[.G396]-[.F397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7]=[.$D$9];[.C397]=&quot;&quot;);&quot;&quot;;IF(ISNUMBER([.C397]);[.C397]+1;1))">
            <text:p/>
          </table:table-cell>
          <table:table-cell table:style-name="ce433" table:formula="of:=IF([.C398]&gt;[.$D$9];&quot;&quot;;PMT([.$D$7];[.$D$9];[.$D$3])*-1)">
            <text:p/>
          </table:table-cell>
          <table:table-cell table:style-name="ce433" table:formula="of:=IF([.C398]&gt;[.$D$9];&quot;&quot;;[.$D$7]*[.G397])">
            <text:p/>
          </table:table-cell>
          <table:table-cell table:style-name="ce439" table:formula="of:=IF([.C398]&gt;[.$D$9];&quot;&quot;;[.D398]-[.E398])">
            <text:p/>
          </table:table-cell>
          <table:table-cell table:style-name="ce433" table:formula="of:=IF([.C398]&gt;[.$D$9];&quot;&quot;;[.G397]-[.F398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8]=[.$D$9];[.C398]=&quot;&quot;);&quot;&quot;;IF(ISNUMBER([.C398]);[.C398]+1;1))">
            <text:p/>
          </table:table-cell>
          <table:table-cell table:style-name="ce433" table:formula="of:=IF([.C399]&gt;[.$D$9];&quot;&quot;;PMT([.$D$7];[.$D$9];[.$D$3])*-1)">
            <text:p/>
          </table:table-cell>
          <table:table-cell table:style-name="ce433" table:formula="of:=IF([.C399]&gt;[.$D$9];&quot;&quot;;[.$D$7]*[.G398])">
            <text:p/>
          </table:table-cell>
          <table:table-cell table:style-name="ce439" table:formula="of:=IF([.C399]&gt;[.$D$9];&quot;&quot;;[.D399]-[.E399])">
            <text:p/>
          </table:table-cell>
          <table:table-cell table:style-name="ce433" table:formula="of:=IF([.C399]&gt;[.$D$9];&quot;&quot;;[.G398]-[.F399])">
            <text:p/>
          </table:table-cell>
          <table:table-cell table:number-columns-repeated="16377"/>
        </table:table-row>
        <table:table-row table:style-name="ro20">
          <table:table-cell table:number-columns-repeated="2"/>
          <table:table-cell table:style-name="ce423" table:formula="of:=IF(OR([.C399]=[.$D$9];[.C399]=&quot;&quot;);&quot;&quot;;IF(ISNUMBER([.C399]);[.C399]+1;1))">
            <text:p/>
          </table:table-cell>
          <table:table-cell table:style-name="ce433" table:formula="of:=IF([.C400]&gt;[.$D$9];&quot;&quot;;PMT([.$D$7];[.$D$9];[.$D$3])*-1)">
            <text:p/>
          </table:table-cell>
          <table:table-cell table:style-name="ce433" table:formula="of:=IF([.C400]&gt;[.$D$9];&quot;&quot;;[.$D$7]*[.G399])">
            <text:p/>
          </table:table-cell>
          <table:table-cell table:style-name="ce439" table:formula="of:=IF([.C400]&gt;[.$D$9];&quot;&quot;;[.D400]-[.E400])">
            <text:p/>
          </table:table-cell>
          <table:table-cell table:style-name="ce433" table:formula="of:=IF([.C400]&gt;[.$D$9];&quot;&quot;;[.G399]-[.F400])">
            <text:p/>
          </table:table-cell>
          <table:table-cell table:number-columns-repeated="16377"/>
        </table:table-row>
        <table:table-row table:style-name="ro20" table:number-rows-repeated="112">
          <table:table-cell table:number-columns-repeated="2"/>
          <table:table-cell table:style-name="ce425"/>
          <table:table-cell table:style-name="ce434" table:number-columns-repeated="4"/>
          <table:table-cell table:number-columns-repeated="16377"/>
        </table:table-row>
        <table:table-row table:style-name="ro20" table:number-rows-repeated="1048063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'Amortización de Préstamos'.C133:'Amortización de Préstamos'.C141">
            <calcext:condition calcext:apply-style-name="ConditionalStyle_1" calcext:value="formula-is([.C133]&lt;&gt;&quot;&quot;)" calcext:base-cell-address="'Amortización de Préstamos'.C133"/>
          </calcext:conditional-format>
          <calcext:conditional-format calcext:target-range-address="'Amortización de Préstamos'.C13:'Amortización de Préstamos'.G13">
            <calcext:condition calcext:apply-style-name="ConditionalStyle_2" calcext:value="formula-is([.$C$13]=0)" calcext:base-cell-address="'Amortización de Préstamos'.C13"/>
          </calcext:conditional-format>
          <calcext:conditional-format calcext:target-range-address="'Amortización de Préstamos'.C13:'Amortización de Préstamos'.G400">
            <calcext:condition calcext:apply-style-name="ConditionalStyle_3" calcext:value="formula-is(ROW()&lt;COUNTIF([.$C:.$C];&quot;&gt;0&quot;)+14)" calcext:base-cell-address="'Amortización de Préstamos'.C13"/>
          </calcext:conditional-format>
          <calcext:conditional-format calcext:target-range-address="'Amortización de Préstamos'.C401:'Amortización de Préstamos'.G512 'Amortización de Préstamos'.C48:'Amortización de Préstamos'.C132 'Amortización de Préstamos'.C142:'Amortización de Préstamos'.C400">
            <calcext:condition calcext:apply-style-name="ConditionalStyle_4" calcext:value="formula-is([.C48]&lt;&gt;&quot;&quot;)" calcext:base-cell-address="'Amortización de Préstamos'.C48"/>
          </calcext:conditional-format>
        </calcext:conditional-formats>
      </table:table>
      <table:table table:name="betas" table:style-name="ta20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1.- Considerando si el proyecto es o no una empresa diversificada en el merc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ergente peruano y usando el modelo de Damodaran de costo de capital propio pa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n proyecto financiado completamente con capital propio, obtener el COK d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alancado (Ku) para el proyecto que viene evaluando:</text:p>
          </table:table-cell>
          <table:table-cell table:number-columns-repeated="6"/>
          <table:table-cell office:value-type="string" calcext:value-type="string">
            <text:p>Rfusa</text:p>
          </table:table-cell>
          <table:table-cell table:style-name="ce451" office:value-type="float" office:value="0.852958685986758" calcext:value-type="float">
            <text:p>0.8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n 1" draw:style-name="gr8" draw:text-style-name="P1" svg:width="20.196cm" svg:height="1.507cm" svg:x="0cm" svg:y="0.662cm">
              <draw:image xlink:href="Pictures/100000000000055600000300BE7C83D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.2. Ku con Riesgo Total</text:p>
          </table:table-cell>
          <table:table-cell table:number-columns-repeated="16383"/>
        </table:table-row>
        <table:table-row table:style-name="ro25">
          <table:table-cell table:style-name="ce448" office:value-type="string" calcext:value-type="string">
            <text:p>Kurt = Rf usa+ u total ME* (Rm- Rf) usa+ Rp PERU</text:p>
          </table:table-cell>
          <table:table-cell table:style-name="ce449" table:number-columns-repeated="2"/>
          <table:table-cell table:style-name="ce450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=</text:p>
          </table:table-cell>
          <table:table-cell table:number-columns-repeated="16382"/>
        </table:table-row>
      </table:table>
      <table:table table:name="j) cronograma deuda" table:style-name="ta21">
        <table:table-column table:style-name="co1" table:number-columns-repeated="2" table:default-cell-style-name="Default"/>
        <table:table-column table:style-name="co1" table:default-cell-style-name="ce457"/>
        <table:table-column table:style-name="co2" table:default-cell-style-name="ce461"/>
        <table:table-column table:style-name="co1" table:default-cell-style-name="ce469"/>
        <table:table-column table:style-name="co1" table:default-cell-style-name="ce471"/>
        <table:table-column table:style-name="co75" table:default-cell-style-name="ce469"/>
        <table:table-column table:style-name="co1" table:default-cell-style-name="ce475"/>
        <table:table-column table:style-name="co1" table:number-columns-repeated="16376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 table:number-columns-repeated="2"/>
          <table:table-cell table:style-name="ce174" office:value-type="string" calcext:value-type="string" table:number-columns-spanned="6" table:number-rows-spanned="1">
            <text:p>CUADRO N° 11</text:p>
          </table:table-cell>
          <table:covered-table-cell table:number-columns-repeated="5" table:style-name="ce174"/>
          <table:table-cell table:number-columns-repeated="16376"/>
        </table:table-row>
        <table:table-row table:style-name="ro1">
          <table:table-cell table:number-columns-repeated="2"/>
          <table:table-cell table:style-name="ce454" office:value-type="string" calcext:value-type="string" table:number-columns-spanned="6" table:number-rows-spanned="1">
            <text:p>AMORTIZACION DE LA DEUDA REAL EN DOLARES</text:p>
          </table:table-cell>
          <table:covered-table-cell table:number-columns-repeated="5" table:style-name="ce458"/>
          <table:table-cell table:number-columns-repeated="16376"/>
        </table:table-row>
        <table:table-row table:style-name="ro1">
          <table:table-cell/>
          <table:table-cell table:style-name="ce452"/>
          <table:table-cell table:style-name="Default" table:number-columns-repeated="5"/>
          <table:table-cell table:style-name="ce472" office:value-type="string" calcext:value-type="string">
            <text:p>Tco =</text:p>
          </table:table-cell>
          <table:table-cell table:style-name="ce476" table:formula="of:=[$DATOS.H8]" office:value-type="float" office:value="3.7" calcext:value-type="float">
            <text:p><text:s/>3.70 </text:p>
          </table:table-cell>
          <table:table-cell table:number-columns-repeated="16375"/>
        </table:table-row>
        <table:table-row table:style-name="ro1">
          <table:table-cell/>
          <table:table-cell table:style-name="ce453" table:number-columns-repeated="2"/>
          <table:table-cell table:style-name="ce453" office:value-type="string" calcext:value-type="string">
            <text:p>Prestamo =</text:p>
          </table:table-cell>
          <table:table-cell table:style-name="ce462" table:formula="of:=0.4*[$'b) Inversión Inicial'.F24]" office:value-type="float" office:value="2302.92859459459" calcext:value-type="float">
            <text:p>2,302.93</text:p>
          </table:table-cell>
          <table:table-cell table:style-name="ce453" table:number-columns-repeated="2"/>
          <table:table-cell table:style-name="ce93" office:value-type="string" calcext:value-type="string">
            <text:p>TC1 =</text:p>
          </table:table-cell>
          <table:table-cell table:style-name="ce204" table:formula="of:=[$DATOS.H9]" office:value-type="float" office:value="3.8" calcext:value-type="float">
            <text:p>3.80</text:p>
          </table:table-cell>
          <table:table-cell table:number-columns-repeated="16375"/>
        </table:table-row>
        <table:table-row table:style-name="ro1">
          <table:table-cell/>
          <table:table-cell table:style-name="ce453" table:number-columns-repeated="2"/>
          <table:table-cell table:style-name="ce453" office:value-type="string" calcext:value-type="string">
            <text:p>TEA nominal =</text:p>
          </table:table-cell>
          <table:table-cell table:style-name="ce463" office:value-type="percentage" office:value="0.23" calcext:value-type="percentage">
            <text:p>23 %</text:p>
          </table:table-cell>
          <table:table-cell table:style-name="ce453" table:number-columns-repeated="3"/>
          <table:table-cell table:number-columns-repeated="16376"/>
        </table:table-row>
        <table:table-row table:style-name="ro1">
          <table:table-cell/>
          <table:table-cell table:style-name="ce453" table:number-columns-repeated="2"/>
          <table:table-cell table:style-name="ce453" office:value-type="string" calcext:value-type="string">
            <text:p>TEM nominal¨=</text:p>
          </table:table-cell>
          <table:table-cell table:style-name="ce464" table:formula="of:=POWER((1+[.E7]);(1/[.E12]))-1" office:value-type="percentage" office:value="0.0174008417721816" calcext:value-type="percentage">
            <text:p>1.7%</text:p>
          </table:table-cell>
          <table:table-cell table:style-name="ce453" table:number-columns-repeated="2"/>
          <table:table-cell table:style-name="ce93"/>
          <table:table-cell table:style-name="ce477"/>
          <table:table-cell table:style-name="ce472"/>
          <table:table-cell table:number-columns-repeated="16374"/>
        </table:table-row>
        <table:table-row table:style-name="ro1">
          <table:table-cell/>
          <table:table-cell table:style-name="ce453" table:number-columns-repeated="2"/>
          <table:table-cell table:style-name="ce93" office:value-type="string" calcext:value-type="string">
            <text:p>Devaluac. Anual =</text:p>
          </table:table-cell>
          <table:table-cell table:style-name="ce464" table:formula="of:=DATOS.Valor_de_venta" office:value-type="percentage" office:value="0.0270270270270269" calcext:value-type="percentage">
            <text:p>2.7%</text:p>
          </table:table-cell>
          <table:table-cell table:style-name="ce453" table:number-columns-repeated="3"/>
          <table:table-cell table:number-columns-repeated="16376"/>
        </table:table-row>
        <table:table-row table:style-name="ro1">
          <table:table-cell/>
          <table:table-cell table:style-name="ce453" table:number-columns-repeated="2"/>
          <table:table-cell table:style-name="ce93" office:value-type="string" calcext:value-type="string">
            <text:p>Devaluac. Mensual =</text:p>
          </table:table-cell>
          <table:table-cell table:style-name="ce465" table:formula="of:=POWER((1+[.E9]);(1/[.E12]))-1" office:value-type="percentage" office:value="0.00222482518232559" calcext:value-type="percentage">
            <text:p>0.22 %</text:p>
          </table:table-cell>
          <table:table-cell table:style-name="ce453" table:number-columns-repeated="3"/>
          <table:table-cell table:number-columns-repeated="16376"/>
        </table:table-row>
        <table:table-row table:style-name="ro1">
          <table:table-cell/>
          <table:table-cell table:style-name="ce453" table:number-columns-repeated="2"/>
          <table:table-cell table:style-name="ce453" office:value-type="string" calcext:value-type="string">
            <text:p>TEM real =</text:p>
          </table:table-cell>
          <table:table-cell table:style-name="ce465" table:formula="of:=((1+[.E8])/(1+[.E10]))-1" office:value-type="percentage" office:value="0.0151423275581855" calcext:value-type="percentage">
            <text:p>1.51 %</text:p>
          </table:table-cell>
          <table:table-cell table:style-name="ce93" office:value-type="string" calcext:value-type="string">
            <text:p>en dolares</text:p>
          </table:table-cell>
          <table:table-cell table:style-name="ce453" table:number-columns-repeated="2"/>
          <table:table-cell table:number-columns-repeated="16376"/>
        </table:table-row>
        <table:table-row table:style-name="ro1">
          <table:table-cell/>
          <table:table-cell table:style-name="ce453" table:number-columns-repeated="2"/>
          <table:table-cell table:style-name="ce453" office:value-type="string" calcext:value-type="string">
            <text:p>n =</text:p>
          </table:table-cell>
          <table:table-cell table:style-name="ce466" office:value-type="float" office:value="12" calcext:value-type="float">
            <text:p>12</text:p>
          </table:table-cell>
          <table:table-cell table:style-name="ce453" table:number-columns-repeated="3"/>
          <table:table-cell table:number-columns-repeated="16376"/>
        </table:table-row>
        <table:table-row table:style-name="ro1">
          <table:table-cell/>
          <table:table-cell table:style-name="ce453" table:number-columns-repeated="2"/>
          <table:table-cell table:style-name="ce93" office:value-type="string" calcext:value-type="string">
            <text:p>cuota Amortización <text:s/>=</text:p>
          </table:table-cell>
          <table:table-cell table:style-name="ce467" table:formula="of:=PMT([.E11];[.E12];[.E6])" office:value-type="float" office:value="-211.319710660891" calcext:value-type="float">
            <text:p>-211.3</text:p>
          </table:table-cell>
          <table:table-cell table:style-name="ce453" table:number-columns-repeated="3"/>
          <table:table-cell table:number-columns-repeated="16376"/>
        </table:table-row>
        <table:table-row table:style-name="ro1">
          <table:table-cell/>
          <table:table-cell table:style-name="ce453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455" office:value-type="string" calcext:value-type="string">
            <text:p>Trimestres</text:p>
          </table:table-cell>
          <table:table-cell table:style-name="ce459" office:value-type="string" calcext:value-type="string">
            <text:p>Saldo inicial</text:p>
          </table:table-cell>
          <table:table-cell table:style-name="ce459" office:value-type="string" calcext:value-type="string">
            <text:p>Interes</text:p>
          </table:table-cell>
          <table:table-cell table:style-name="ce332" office:value-type="string" calcext:value-type="string">
            <text:p>CAPITAL</text:p>
          </table:table-cell>
          <table:table-cell table:style-name="ce332" office:value-type="string" calcext:value-type="string">
            <text:p>AMORTIZACION</text:p>
          </table:table-cell>
          <table:table-cell table:style-name="ce473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56" office:value-type="string" calcext:value-type="string">
            <text:p>Tota Año 1</text:p>
          </table:table-cell>
          <table:table-cell table:style-name="ce460"/>
          <table:table-cell table:style-name="ce468" table:formula="of:=SUM([.E17:.E28])" office:value-type="float" office:value="232.907933336094" calcext:value-type="float">
            <text:p>233</text:p>
          </table:table-cell>
          <table:table-cell table:style-name="ce470" table:formula="of:=SUM([.F17:.F28])" office:value-type="float" office:value="2302.9285945946" calcext:value-type="float">
            <text:p>2302.9</text:p>
          </table:table-cell>
          <table:table-cell table:style-name="ce468" table:formula="of:=SUM([.G17:.G28])" office:value-type="float" office:value="2535.83652793069" calcext:value-type="float">
            <text:p>2536</text:p>
          </table:table-cell>
          <table:table-cell table:style-name="ce474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6]" office:value-type="float" office:value="2302.92859459459" calcext:value-type="float">
            <text:p>2303</text:p>
          </table:table-cell>
          <table:table-cell table:formula="of:=[.D17]*[.$E$11]" office:value-type="float" office:value="34.871699122463" calcext:value-type="float">
            <text:p>35</text:p>
          </table:table-cell>
          <table:table-cell table:formula="of:=[.G17]-[.E17]" office:value-type="float" office:value="176.448011538428" calcext:value-type="float">
            <text:p>176.4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17]-[.F17]" office:value-type="float" office:value="2126.48058305617" calcext:value-type="float">
            <text:p>212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2" calcext:value-type="float">
            <text:p>2</text:p>
          </table:table-cell>
          <table:table-cell table:formula="of:=[.H17]" office:value-type="float" office:value="2126.48058305617" calcext:value-type="float">
            <text:p>2126</text:p>
          </table:table-cell>
          <table:table-cell table:formula="of:=[.D18]*[.$E$11]" office:value-type="float" office:value="32.1998655347577" calcext:value-type="float">
            <text:p>32</text:p>
          </table:table-cell>
          <table:table-cell table:formula="of:=[.G18]-[.E18]" office:value-type="float" office:value="179.119845126133" calcext:value-type="float">
            <text:p>179.1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18]-[.F18]" office:value-type="float" office:value="1947.36073793003" calcext:value-type="float">
            <text:p>194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8]+1" office:value-type="float" office:value="3" calcext:value-type="float">
            <text:p>3</text:p>
          </table:table-cell>
          <table:table-cell table:formula="of:=[.H18]" office:value-type="float" office:value="1947.36073793003" calcext:value-type="float">
            <text:p>1947</text:p>
          </table:table-cell>
          <table:table-cell table:formula="of:=[.D19]*[.$E$11]" office:value-type="float" office:value="29.4875741676863" calcext:value-type="float">
            <text:p>29</text:p>
          </table:table-cell>
          <table:table-cell table:formula="of:=[.G19]-[.E19]" office:value-type="float" office:value="181.832136493204" calcext:value-type="float">
            <text:p>181.8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19]-[.F19]" office:value-type="float" office:value="1765.52860143683" calcext:value-type="float">
            <text:p>176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4" calcext:value-type="float">
            <text:p>4</text:p>
          </table:table-cell>
          <table:table-cell table:formula="of:=[.H19]" office:value-type="float" office:value="1765.52860143683" calcext:value-type="float">
            <text:p>1766</text:p>
          </table:table-cell>
          <table:table-cell table:formula="of:=[.D20]*[.$E$11]" office:value-type="float" office:value="26.7342123963015" calcext:value-type="float">
            <text:p>27</text:p>
          </table:table-cell>
          <table:table-cell table:formula="of:=[.G20]-[.E20]" office:value-type="float" office:value="184.585498264589" calcext:value-type="float">
            <text:p>184.6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0]-[.F20]" office:value-type="float" office:value="1580.94310317224" calcext:value-type="float">
            <text:p>158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0]+1" office:value-type="float" office:value="5" calcext:value-type="float">
            <text:p>5</text:p>
          </table:table-cell>
          <table:table-cell table:formula="of:=[.H20]" office:value-type="float" office:value="1580.94310317224" calcext:value-type="float">
            <text:p>1581</text:p>
          </table:table-cell>
          <table:table-cell table:formula="of:=[.D21]*[.$E$11]" office:value-type="float" office:value="23.9391583190882" calcext:value-type="float">
            <text:p>24</text:p>
          </table:table-cell>
          <table:table-cell table:formula="of:=[.G21]-[.E21]" office:value-type="float" office:value="187.380552341802" calcext:value-type="float">
            <text:p>187.4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1]-[.F21]" office:value-type="float" office:value="1393.56255083044" calcext:value-type="float">
            <text:p>139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6" calcext:value-type="float">
            <text:p>6</text:p>
          </table:table-cell>
          <table:table-cell table:formula="of:=[.H21]" office:value-type="float" office:value="1393.56255083044" calcext:value-type="float">
            <text:p>1394</text:p>
          </table:table-cell>
          <table:table-cell table:formula="of:=[.D22]*[.$E$11]" office:value-type="float" office:value="21.101780617495" calcext:value-type="float">
            <text:p>21</text:p>
          </table:table-cell>
          <table:table-cell table:formula="of:=[.G22]-[.E22]" office:value-type="float" office:value="190.217930043396" calcext:value-type="float">
            <text:p>190.2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2]-[.F22]" office:value-type="float" office:value="1203.34462078704" calcext:value-type="float">
            <text:p>120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7" calcext:value-type="float">
            <text:p>7</text:p>
          </table:table-cell>
          <table:table-cell table:formula="of:=[.H22]" office:value-type="float" office:value="1203.34462078704" calcext:value-type="float">
            <text:p>1203</text:p>
          </table:table-cell>
          <table:table-cell table:formula="of:=[.D23]*[.$E$11]" office:value-type="float" office:value="18.2214384133379" calcext:value-type="float">
            <text:p>18</text:p>
          </table:table-cell>
          <table:table-cell table:formula="of:=[.G23]-[.E23]" office:value-type="float" office:value="193.098272247553" calcext:value-type="float">
            <text:p>193.1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3]-[.F23]" office:value-type="float" office:value="1010.24634853949" calcext:value-type="float">
            <text:p>10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8" calcext:value-type="float">
            <text:p>8</text:p>
          </table:table-cell>
          <table:table-cell table:formula="of:=[.H23]" office:value-type="float" office:value="1010.24634853949" calcext:value-type="float">
            <text:p>1010</text:p>
          </table:table-cell>
          <table:table-cell table:formula="of:=[.D24]*[.$E$11]" office:value-type="float" office:value="15.2974811240457" calcext:value-type="float">
            <text:p>15</text:p>
          </table:table-cell>
          <table:table-cell table:formula="of:=[.G24]-[.E24]" office:value-type="float" office:value="196.022229536845" calcext:value-type="float">
            <text:p>196.0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4]-[.F24]" office:value-type="float" office:value="814.224119002644" calcext:value-type="float">
            <text:p>8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9" calcext:value-type="float">
            <text:p>9</text:p>
          </table:table-cell>
          <table:table-cell table:formula="of:=[.H24]" office:value-type="float" office:value="814.224119002644" calcext:value-type="float">
            <text:p>814</text:p>
          </table:table-cell>
          <table:table-cell table:formula="of:=[.D25]*[.$E$11]" office:value-type="float" office:value="12.329248315713" calcext:value-type="float">
            <text:p>12</text:p>
          </table:table-cell>
          <table:table-cell table:formula="of:=[.G25]-[.E25]" office:value-type="float" office:value="198.990462345178" calcext:value-type="float">
            <text:p>199.0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5]-[.F25]" office:value-type="float" office:value="615.233656657467" calcext:value-type="float">
            <text:p>6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0" calcext:value-type="float">
            <text:p>10</text:p>
          </table:table-cell>
          <table:table-cell table:formula="of:=[.H25]" office:value-type="float" office:value="615.233656657467" calcext:value-type="float">
            <text:p>615</text:p>
          </table:table-cell>
          <table:table-cell table:formula="of:=[.D26]*[.$E$11]" office:value-type="float" office:value="9.31606955392756" calcext:value-type="float">
            <text:p>9</text:p>
          </table:table-cell>
          <table:table-cell table:formula="of:=[.G26]-[.E26]" office:value-type="float" office:value="202.003641106963" calcext:value-type="float">
            <text:p>202.0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6]-[.F26]" office:value-type="float" office:value="413.230015550503" calcext:value-type="float">
            <text:p>4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1" calcext:value-type="float">
            <text:p>11</text:p>
          </table:table-cell>
          <table:table-cell table:formula="of:=[.H26]" office:value-type="float" office:value="413.230015550503" calcext:value-type="float">
            <text:p>413</text:p>
          </table:table-cell>
          <table:table-cell table:formula="of:=[.D27]*[.$E$11]" office:value-type="float" office:value="6.25726425233979" calcext:value-type="float">
            <text:p>6</text:p>
          </table:table-cell>
          <table:table-cell table:formula="of:=[.G27]-[.E27]" office:value-type="float" office:value="205.062446408551" calcext:value-type="float">
            <text:p>205.1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7]-[.F27]" office:value-type="float" office:value="208.167569141952" calcext:value-type="float">
            <text:p>20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2" calcext:value-type="float">
            <text:p>12</text:p>
          </table:table-cell>
          <table:table-cell table:formula="of:=[.H27]" office:value-type="float" office:value="208.167569141952" calcext:value-type="float">
            <text:p>208</text:p>
          </table:table-cell>
          <table:table-cell table:formula="of:=[.D28]*[.$E$11]" office:value-type="float" office:value="3.15214151893866" calcext:value-type="float">
            <text:p>3</text:p>
          </table:table-cell>
          <table:table-cell table:formula="of:=[.G28]-[.E28]" office:value-type="float" office:value="208.167569141952" calcext:value-type="float">
            <text:p>208.2</text:p>
          </table:table-cell>
          <table:table-cell table:formula="of:=-[.$E$13]" office:value-type="float" office:value="211.319710660891" calcext:value-type="float">
            <text:p>211</text:p>
          </table:table-cell>
          <table:table-cell table:formula="of:=[.D28]-[.F28]" office:value-type="float" office:value="0" calcext:value-type="float">
            <text:p>0</text:p>
          </table:table-cell>
          <table:table-cell table:number-columns-repeated="16376"/>
        </table:table-row>
      </table:table>
      <table:table table:name="k) Flujos de Caja" table:style-name="ta22">
        <table:table-column table:style-name="co13" table:number-columns-repeated="2" table:default-cell-style-name="ce20"/>
        <table:table-column table:style-name="co76" table:default-cell-style-name="ce20"/>
        <table:table-column table:style-name="co7" table:default-cell-style-name="ce20"/>
        <table:table-column table:style-name="co77" table:default-cell-style-name="ce20"/>
        <table:table-column table:style-name="co26" table:default-cell-style-name="ce20"/>
        <table:table-column table:style-name="co31" table:default-cell-style-name="ce20"/>
        <table:table-column table:style-name="co13" table:default-cell-style-name="ce20"/>
        <table:table-column table:style-name="co37" table:default-cell-style-name="ce20"/>
        <table:table-column table:style-name="co13" table:number-columns-repeated="15" table:default-cell-style-name="ce20"/>
        <table:table-column table:style-name="co14" table:number-columns-repeated="16360" table:default-cell-style-name="ce20"/>
        <table:table-row table:style-name="ro4">
          <table:table-cell/>
          <table:table-cell table:style-name="ce348"/>
          <table:table-cell table:number-columns-repeated="16382"/>
        </table:table-row>
        <table:table-row table:style-name="ro4">
          <table:table-cell/>
          <table:table-cell table:style-name="ce348"/>
          <table:table-cell table:style-name="ce22" office:value-type="string" calcext:value-type="string" table:number-columns-spanned="5" table:number-rows-spanned="1">
            <text:p>CUADRO N° 12</text:p>
          </table:table-cell>
          <table:covered-table-cell table:number-columns-repeated="4"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47" office:value-type="string" calcext:value-type="string" table:number-columns-spanned="5" table:number-rows-spanned="1">
            <text:p>FLUJOS DE CAJA ECONOMICO Y FINANCIERO</text:p>
          </table:table-cell>
          <table:covered-table-cell table:number-columns-repeated="4" table:style-name="ce35"/>
          <table:table-cell table:number-columns-repeated="16377"/>
        </table:table-row>
        <table:table-row table:style-name="ro7">
          <table:table-cell table:number-columns-repeated="2"/>
          <table:table-cell table:style-name="ce244" table:number-columns-repeated="5"/>
          <table:table-cell table:number-columns-repeated="16377"/>
        </table:table-row>
        <table:table-row table:style-name="ro7">
          <table:table-cell table:number-columns-repeated="2"/>
          <table:table-cell table:style-name="ce258" office:value-type="string" calcext:value-type="string">
            <text:p>RUBRO</text:p>
          </table:table-cell>
          <table:table-cell table:style-name="ce258" office:value-type="string" calcext:value-type="string">
            <text:p>Año 0</text:p>
          </table:table-cell>
          <table:table-cell table:style-name="ce258" office:value-type="string" calcext:value-type="string">
            <text:p>Año 1</text:p>
          </table:table-cell>
          <table:table-cell table:style-name="ce258" office:value-type="string" calcext:value-type="string">
            <text:p>Año 2</text:p>
          </table:table-cell>
          <table:table-cell table:style-name="ce258" office:value-type="string" calcext:value-type="string">
            <text:p>Año 3</text:p>
          </table:table-cell>
          <table:table-cell table:number-columns-repeated="16377"/>
        </table:table-row>
        <table:table-row table:style-name="ro26">
          <table:table-cell table:number-columns-repeated="2"/>
          <table:table-cell table:style-name="ce39" office:value-type="string" calcext:value-type="string">
            <text:p>Activo fijo tangible</text:p>
          </table:table-cell>
          <table:table-cell table:style-name="ce260" table:formula="of:=-[$'b) Inversión Inicial'.F8]" office:value-type="float" office:value="-3864.86486486486" calcext:value-type="float">
            <text:p>-3865</text:p>
          </table:table-cell>
          <table:table-cell table:style-name="ce260" table:number-columns-repeated="3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Activo fijo intangible</text:p>
          </table:table-cell>
          <table:table-cell table:style-name="ce260" table:formula="of:=-[$'b) Inversión Inicial'.F17]" office:value-type="float" office:value="-121.621621621622" calcext:value-type="float">
            <text:p>-122</text:p>
          </table:table-cell>
          <table:table-cell table:style-name="ce260" table:number-columns-repeated="3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Capital de trabajo</text:p>
          </table:table-cell>
          <table:table-cell table:style-name="ce260" table:formula="of:=-[$'h) Capital_Trabajo'.P12]" office:value-type="float" office:value="-1770.835" calcext:value-type="float">
            <text:p>-1771</text:p>
          </table:table-cell>
          <table:table-cell table:style-name="ce260" table:formula="of:=-[$'h) Capital_Trabajo'.P22]" office:value-type="float" office:value="-482.955" calcext:value-type="float">
            <text:p>-483</text:p>
          </table:table-cell>
          <table:table-cell table:style-name="ce260" table:formula="of:=-[$'h) Capital_Trabajo'.P33]" office:value-type="float" office:value="-482.955" calcext:value-type="float">
            <text:p>-483</text:p>
          </table:table-cell>
          <table:table-cell table:style-name="ce484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Recupero de capital de trabajo</text:p>
          </table:table-cell>
          <table:table-cell table:style-name="ce260" table:number-columns-repeated="3"/>
          <table:table-cell table:style-name="ce260" table:formula="of:=-SUM([.D8:.F8])" office:value-type="float" office:value="2736.745" calcext:value-type="float">
            <text:p>2737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Recupero de activo fijo</text:p>
          </table:table-cell>
          <table:table-cell table:style-name="ce259" table:number-columns-repeated="2"/>
          <table:table-cell table:style-name="ce484"/>
          <table:table-cell table:style-name="ce260" table:formula="of:=[$'c) Dep. y VR'.H8]" office:value-type="float" office:value="659.459459459459" calcext:value-type="float">
            <text:p>659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250" office:value-type="string" calcext:value-type="string">
            <text:p>Flujo de Inversión y Liquidación</text:p>
          </table:table-cell>
          <table:table-cell table:style-name="ce261" table:formula="of:=SUM([.D6:.D10])" office:value-type="float" office:value="-5757.32148648649" calcext:value-type="float">
            <text:p>-5757</text:p>
          </table:table-cell>
          <table:table-cell table:style-name="ce261" table:formula="of:=SUM([.E6:.E10])" office:value-type="float" office:value="-482.955" calcext:value-type="float">
            <text:p>-483</text:p>
          </table:table-cell>
          <table:table-cell table:style-name="ce261" table:formula="of:=SUM([.F6:.F10])" office:value-type="float" office:value="-482.955" calcext:value-type="float">
            <text:p>-483</text:p>
          </table:table-cell>
          <table:table-cell table:style-name="ce261" table:formula="of:=SUM([.G6:.G10])" office:value-type="float" office:value="3396.20445945946" calcext:value-type="float">
            <text:p>3396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Ingresos por ventas</text:p>
          </table:table-cell>
          <table:table-cell table:style-name="ce260"/>
          <table:table-cell table:style-name="ce260" table:formula="of:=[$'i) Estado de Resultados'.D9]" office:value-type="float" office:value="36337.5" calcext:value-type="float">
            <text:p>36338</text:p>
          </table:table-cell>
          <table:table-cell table:style-name="ce260" table:formula="of:=[$'i) Estado de Resultados'.E9]" office:value-type="float" office:value="40755" calcext:value-type="float">
            <text:p>40755</text:p>
          </table:table-cell>
          <table:table-cell table:style-name="ce260" table:formula="of:=[$'i) Estado de Resultados'.F9]" office:value-type="float" office:value="50445" calcext:value-type="float">
            <text:p>50445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Costos de produccion (*)</text:p>
          </table:table-cell>
          <table:table-cell table:style-name="ce260"/>
          <table:table-cell table:style-name="ce260" table:formula="of:=-([$'i) Estado de Resultados'.D12]-[$'i) Estado de Resultados'.D16])" office:value-type="float" office:value="-24405.45" calcext:value-type="float">
            <text:p>-24405</text:p>
          </table:table-cell>
          <table:table-cell table:style-name="ce260" table:formula="of:=-([$'i) Estado de Resultados'.E12]-[$'i) Estado de Resultados'.E16])" office:value-type="float" office:value="-25619.1" calcext:value-type="float">
            <text:p>-25619</text:p>
          </table:table-cell>
          <table:table-cell table:style-name="ce260" table:formula="of:=-([$'i) Estado de Resultados'.F12]-[$'i) Estado de Resultados'.F16])" office:value-type="float" office:value="-31116.9" calcext:value-type="float">
            <text:p>-31117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Gastos operativos (**)</text:p>
          </table:table-cell>
          <table:table-cell table:style-name="ce260"/>
          <table:table-cell table:style-name="ce260" table:formula="of:=-([$'i) Estado de Resultados'.D18]-[$'i) Estado de Resultados'.D21])" office:value-type="float" office:value="-18681.8594594595" calcext:value-type="float">
            <text:p>-18682</text:p>
          </table:table-cell>
          <table:table-cell table:style-name="ce260" table:formula="of:=-([$'i) Estado de Resultados'.E18]-[$'i) Estado de Resultados'.E21])" office:value-type="float" office:value="-18681.8594594595" calcext:value-type="float">
            <text:p>-18682</text:p>
          </table:table-cell>
          <table:table-cell table:style-name="ce260" table:formula="of:=-([$'i) Estado de Resultados'.F18]-[$'i) Estado de Resultados'.F21])" office:value-type="float" office:value="-18681.8594594595" calcext:value-type="float">
            <text:p>-18682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Impuestos</text:p>
          </table:table-cell>
          <table:table-cell table:style-name="ce260"/>
          <table:table-cell table:style-name="ce260" office:value-type="float" office:value="0" calcext:value-type="float">
            <text:p>0</text:p>
          </table:table-cell>
          <table:table-cell table:style-name="ce260" table:formula="of:=-[$'i) Estado de Resultados'.E25]" office:value-type="float" office:value="-0" calcext:value-type="float">
            <text:p>0</text:p>
          </table:table-cell>
          <table:table-cell table:style-name="ce260" table:formula="of:=-[$'i) Estado de Resultados'.F25]" office:value-type="float" office:value="-0" calcext:value-type="float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50" office:value-type="string" calcext:value-type="string">
            <text:p>Flujo <text:s/>Operativo</text:p>
          </table:table-cell>
          <table:table-cell table:style-name="ce261" table:formula="of:=SUM([.D12:.D15])" office:value-type="float" office:value="0" calcext:value-type="float">
            <text:p>0</text:p>
          </table:table-cell>
          <table:table-cell table:style-name="ce261" table:formula="of:=SUM([.E12:.E15])" office:value-type="float" office:value="-6749.80945945946" calcext:value-type="float">
            <text:p>-6750</text:p>
          </table:table-cell>
          <table:table-cell table:style-name="ce261" table:formula="of:=SUM([.F12:.F15])" office:value-type="float" office:value="-3545.95945945946" calcext:value-type="float">
            <text:p>-3546</text:p>
          </table:table-cell>
          <table:table-cell table:style-name="ce261" table:formula="of:=SUM([.G12:.G15])" office:value-type="float" office:value="646.240540540537" calcext:value-type="float">
            <text:p>646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50" office:value-type="string" calcext:value-type="string">
            <text:p>Flujo de Caja Económico, FCE</text:p>
          </table:table-cell>
          <table:table-cell table:style-name="ce480" table:formula="of:=[.D11]+[.D16]" office:value-type="float" office:value="-5757.32148648649" calcext:value-type="float">
            <text:p>-5757</text:p>
          </table:table-cell>
          <table:table-cell table:style-name="ce480" table:formula="of:=[.E11]+[.E16]" office:value-type="float" office:value="-7232.76445945946" calcext:value-type="float">
            <text:p>-7233</text:p>
          </table:table-cell>
          <table:table-cell table:style-name="ce480" table:formula="of:=[.F11]+[.F16]" office:value-type="float" office:value="-4028.91445945946" calcext:value-type="float">
            <text:p>-4029</text:p>
          </table:table-cell>
          <table:table-cell table:style-name="ce480" table:formula="of:=[.G11]+[.G16]" office:value-type="float" office:value="4042.445" calcext:value-type="float">
            <text:p>4042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Préstamo</text:p>
          </table:table-cell>
          <table:table-cell table:style-name="ce260" table:formula="of:=[$'j) cronograma deuda'.E6]" office:value-type="float" office:value="2302.92859459459" calcext:value-type="float">
            <text:p>2303</text:p>
          </table:table-cell>
          <table:table-cell table:style-name="ce260" table:number-columns-repeated="3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Capital </text:p>
          </table:table-cell>
          <table:table-cell table:style-name="ce260"/>
          <table:table-cell table:style-name="ce260" table:formula="of:=-[$'j) cronograma deuda'.F16]" office:value-type="float" office:value="-2302.9285945946" calcext:value-type="float">
            <text:p>-2303</text:p>
          </table:table-cell>
          <table:table-cell table:style-name="ce260" table:number-columns-repeated="2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Interés</text:p>
          </table:table-cell>
          <table:table-cell table:style-name="ce260"/>
          <table:table-cell table:style-name="ce260" table:formula="of:=-[$'j) cronograma deuda'.E16]" office:value-type="float" office:value="-232.907933336094" calcext:value-type="float">
            <text:p>-233</text:p>
          </table:table-cell>
          <table:table-cell table:style-name="ce260" table:number-columns-repeated="2"/>
          <table:table-cell table:number-columns-repeated="16377"/>
        </table:table-row>
        <table:table-row table:style-name="ro4">
          <table:table-cell table:number-columns-repeated="2"/>
          <table:table-cell table:style-name="ce39" office:value-type="string" calcext:value-type="string">
            <text:p>Escudo fiscal de intereses</text:p>
          </table:table-cell>
          <table:table-cell table:style-name="ce260"/>
          <table:table-cell table:style-name="ce260" table:formula="of:=-[.E20]*0.1" office:value-type="float" office:value="23.2907933336094" calcext:value-type="float">
            <text:p>23</text:p>
          </table:table-cell>
          <table:table-cell table:style-name="ce260" table:number-columns-repeated="2"/>
          <table:table-cell table:number-columns-repeated="16377"/>
        </table:table-row>
        <table:table-row table:style-name="ro7">
          <table:table-cell table:number-columns-repeated="2"/>
          <table:table-cell table:style-name="ce250" office:value-type="string" calcext:value-type="string">
            <text:p>Flujo de Caja de la Deuda, FCD</text:p>
          </table:table-cell>
          <table:table-cell table:style-name="ce261" table:formula="of:=SUM([.D18:.D21])" office:value-type="float" office:value="2302.92859459459" calcext:value-type="float">
            <text:p>2303</text:p>
          </table:table-cell>
          <table:table-cell table:style-name="ce261" table:formula="of:=SUM([.E18:.E21])" office:value-type="float" office:value="-2512.54573459708" calcext:value-type="float">
            <text:p>-2513</text:p>
          </table:table-cell>
          <table:table-cell table:style-name="ce261" table:number-columns-repeated="2"/>
          <table:table-cell table:number-columns-repeated="16377"/>
        </table:table-row>
        <table:table-row table:style-name="ro7">
          <table:table-cell table:number-columns-repeated="2"/>
          <table:table-cell table:style-name="ce250" office:value-type="string" calcext:value-type="string">
            <text:p>Flujo de Caja Financiero, FCF</text:p>
          </table:table-cell>
          <table:table-cell table:style-name="ce480" table:formula="of:=[.D17]+[.D22]" office:value-type="float" office:value="-3454.39289189189" calcext:value-type="float">
            <text:p>-3454</text:p>
          </table:table-cell>
          <table:table-cell table:style-name="ce261" table:formula="of:=[.E17]+[.E22]" office:value-type="float" office:value="-9745.31019405654" calcext:value-type="float">
            <text:p>-9745</text:p>
          </table:table-cell>
          <table:table-cell table:style-name="ce261" table:formula="of:=[.F17]+[.F22]" office:value-type="float" office:value="-4028.91445945946" calcext:value-type="float">
            <text:p>-4029</text:p>
          </table:table-cell>
          <table:table-cell table:style-name="ce261" table:formula="of:=[.G17]+[.G22]" office:value-type="float" office:value="4042.445" calcext:value-type="float">
            <text:p>4042</text:p>
          </table:table-cell>
          <table:table-cell table:number-columns-repeated="16377"/>
        </table:table-row>
        <table:table-row table:style-name="ro27">
          <table:table-cell table:number-columns-repeated="2"/>
          <table:table-cell table:style-name="ce478" office:value-type="string" calcext:value-type="string">
            <text:p>VA EFI</text:p>
          </table:table-cell>
          <table:table-cell table:style-name="ce481" table:formula="of:=[$Rentabilidad.D22]" office:value-type="float" office:value="19.4473774264372" calcext:value-type="float">
            <text:p>19.4</text:p>
          </table:table-cell>
          <table:table-cell table:style-name="ce244" table:number-columns-repeated="3"/>
          <table:table-cell table:number-columns-repeated="16377"/>
        </table:table-row>
        <table:table-row table:style-name="ro4">
          <table:table-cell table:number-columns-repeated="2"/>
          <table:table-cell table:style-name="ce479" office:value-type="string" calcext:value-type="string">
            <text:p>Flujo de Caja Ajustado 1 FCA</text:p>
          </table:table-cell>
          <table:table-cell table:style-name="ce482" table:formula="of:=[.D17]+[.D21]" office:value-type="float" office:value="-5757.32148648649" calcext:value-type="float">
            <text:p>-5757</text:p>
          </table:table-cell>
          <table:table-cell table:style-name="ce482" table:formula="of:=[.E17]+[.E21]" office:value-type="float" office:value="-7209.47366612585" calcext:value-type="float">
            <text:p>-7209</text:p>
          </table:table-cell>
          <table:table-cell table:style-name="ce482" table:formula="of:=[.F17]+[.F21]" office:value-type="float" office:value="-4028.91445945946" calcext:value-type="float">
            <text:p>-4029</text:p>
          </table:table-cell>
          <table:table-cell table:style-name="ce482" table:formula="of:=[.G17]+[.G21]" office:value-type="float" office:value="4042.445" calcext:value-type="float">
            <text:p>4042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479" office:value-type="string" calcext:value-type="string">
            <text:p>Flujo de Caja Ajustado 2 FCA</text:p>
          </table:table-cell>
          <table:table-cell table:style-name="ce482" table:formula="of:=[.D17]+[.D24]" office:value-type="float" office:value="-5737.87410906005" calcext:value-type="float">
            <text:p>-5738</text:p>
          </table:table-cell>
          <table:table-cell table:style-name="ce482" table:formula="of:=[.E17]+[.E24]" office:value-type="float" office:value="-7232.76445945946" calcext:value-type="float">
            <text:p>-7233</text:p>
          </table:table-cell>
          <table:table-cell table:style-name="ce482" table:formula="of:=[.F17]+[.F24]" office:value-type="float" office:value="-4028.91445945946" calcext:value-type="float">
            <text:p>-4029</text:p>
          </table:table-cell>
          <table:table-cell table:style-name="ce482" table:formula="of:=[.G17]+[.G24]" office:value-type="float" office:value="4042.445" calcext:value-type="float">
            <text:p>4042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244" office:value-type="string" calcext:value-type="string">
            <text:p>(*) Régimen laboral pequeña empresa</text:p>
          </table:table-cell>
          <table:table-cell table:number-columns-repeated="16381"/>
        </table:table-row>
        <table:table-row table:style-name="ro4">
          <table:table-cell table:number-columns-repeated="2"/>
          <table:table-cell table:style-name="ce244" office:value-type="string" calcext:value-type="string">
            <text:p>(**) Regimen MYPE Tributario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3"/>
          <table:table-cell table:style-name="ce483"/>
          <table:table-cell table:number-columns-repeated="16380"/>
        </table:table-row>
        <table:table-row table:style-name="ro4" table:number-rows-repeated="905">
          <table:table-cell table:number-columns-repeated="16384"/>
        </table:table-row>
        <table:table-row table:style-name="ro8" table:number-rows-repeated="104763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.) Ku" table:style-name="ta23">
        <table:table-column table:style-name="co13" table:default-cell-style-name="ce485"/>
        <table:table-column table:style-name="co78" table:default-cell-style-name="ce485"/>
        <table:table-column table:style-name="co13" table:number-columns-repeated="19" table:default-cell-style-name="ce485"/>
        <table:table-column table:style-name="co14" table:number-columns-repeated="16363" table:default-cell-style-name="ce485"/>
        <table:table-row table:style-name="ro4">
          <table:table-cell table:number-columns-repeated="16384"/>
        </table:table-row>
        <table:table-row table:style-name="ro4">
          <table:table-cell/>
          <table:table-cell table:style-name="ce486" office:value-type="string" calcext:value-type="string" table:number-columns-spanned="5" table:number-rows-spanned="1">
            <text:p>COK DES APALANCADO <text:s/>CON RIESGO TOTAL</text:p>
          </table:table-cell>
          <table:covered-table-cell table:number-columns-repeated="3" table:style-name="ce494"/>
          <table:covered-table-cell table:style-name="ce503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1">
          <table:table-cell/>
          <table:table-cell table:style-name="ce487" office:value-type="string" calcext:value-type="string">
            <text:p><text:span text:style-name="T11">Kurt = Rf usa+ </text:span><text:span text:style-name="T12">b</text:span><text:span text:style-name="T13">u total </text:span><text:span text:style-name="T14">ME</text:span><text:span text:style-name="T15">* (Rm- Rf)</text:span><text:span text:style-name="T14"> </text:span><text:span text:style-name="T15">usa+ Rp </text:span><text:span text:style-name="T14">PERU</text:span><text:span text:style-name="T15"> </text:span></text:p>
          </table:table-cell>
          <table:table-cell table:style-name="ce495" table:number-columns-repeated="3"/>
          <table:table-cell table:style-name="ce50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488" office:value-type="string" calcext:value-type="string">
            <text:p>Donde</text:p>
          </table:table-cell>
          <table:table-cell table:style-name="ce496"/>
          <table:table-cell table:number-columns-repeated="16381"/>
        </table:table-row>
        <table:table-row table:style-name="ro4">
          <table:table-cell/>
          <table:table-cell table:style-name="ce489" office:value-type="string" calcext:value-type="string">
            <text:p>Rf usa =</text:p>
          </table:table-cell>
          <table:table-cell table:style-name="ce497" office:value-type="percentage" office:value="0.0495" calcext:value-type="percentage">
            <text:p>4.95 %</text:p>
          </table:table-cell>
          <table:table-cell table:style-name="ce501" office:value-type="string" calcext:value-type="string">
            <text:p>promedio geometrico 1928-2020</text:p>
          </table:table-cell>
          <table:table-cell table:style-name="ce502" table:number-columns-repeated="4"/>
          <table:table-cell table:number-columns-repeated="16376"/>
        </table:table-row>
        <table:table-row table:style-name="ro4">
          <table:table-cell/>
          <table:table-cell table:style-name="ce490" office:value-type="string" calcext:value-type="string">
            <text:p>βu total ME =</text:p>
          </table:table-cell>
          <table:table-cell table:style-name="ce498" office:value-type="float" office:value="3.8" calcext:value-type="float">
            <text:p>3.8</text:p>
          </table:table-cell>
          <table:table-cell table:style-name="ce501" office:value-type="string" calcext:value-type="string">
            <text:p>Beta total desapalancado para Muebles / Muebles para el hogar</text:p>
          </table:table-cell>
          <table:table-cell table:style-name="ce502" table:number-columns-repeated="4"/>
          <table:table-cell table:number-columns-repeated="16376"/>
        </table:table-row>
        <table:table-row table:style-name="ro4">
          <table:table-cell/>
          <table:table-cell table:style-name="ce491" office:value-type="string" calcext:value-type="string">
            <text:p>(Rm-Rf)usa=</text:p>
          </table:table-cell>
          <table:table-cell table:style-name="ce497" office:value-type="percentage" office:value="0.0464" calcext:value-type="percentage">
            <text:p>4.64 %</text:p>
          </table:table-cell>
          <table:table-cell table:style-name="ce501" office:value-type="string" calcext:value-type="string">
            <text:p>promedio geometrico 1928-2020</text:p>
          </table:table-cell>
          <table:table-cell table:style-name="ce502" table:number-columns-repeated="4"/>
          <table:table-cell table:number-columns-repeated="16376"/>
        </table:table-row>
        <table:table-row table:style-name="ro4">
          <table:table-cell/>
          <table:table-cell table:style-name="ce491" office:value-type="string" calcext:value-type="string">
            <text:p>Rp =</text:p>
          </table:table-cell>
          <table:table-cell table:style-name="ce497" table:formula="of:=DATOS.Valor_Mano_Obra" office:value-type="percentage" office:value="0.0174" calcext:value-type="percentage">
            <text:p>1.74 %</text:p>
          </table:table-cell>
          <table:table-cell table:style-name="ce501" office:value-type="string" calcext:value-type="string">
            <text:p>Promedio 2020 Perú</text:p>
          </table:table-cell>
          <table:table-cell table:style-name="ce502" table:number-columns-repeated="4"/>
          <table:table-cell table:number-columns-repeated="16376"/>
        </table:table-row>
        <table:table-row table:style-name="ro4">
          <table:table-cell/>
          <table:table-cell table:style-name="ce492"/>
          <table:table-cell table:style-name="ce499"/>
          <table:table-cell table:style-name="ce502" table:number-columns-repeated="5"/>
          <table:table-cell table:number-columns-repeated="16376"/>
        </table:table-row>
        <table:table-row table:style-name="ro4">
          <table:table-cell/>
          <table:table-cell table:style-name="ce493" office:value-type="string" calcext:value-type="string">
            <text:p>Kurt =</text:p>
          </table:table-cell>
          <table:table-cell table:style-name="ce500" table:formula="of:=[.C7]+[.C8]*[.C9]+[.C10]" office:value-type="percentage" office:value="0.24322" calcext:value-type="percentage">
            <text:p>24.32 %</text:p>
          </table:table-cell>
          <table:table-cell table:style-name="ce501" office:value-type="string" calcext:value-type="string">
            <text:p>Dolares nominales</text:p>
          </table:table-cell>
          <table:table-cell table:style-name="ce502" table:number-columns-repeated="4"/>
          <table:table-cell table:number-columns-repeated="16376"/>
        </table:table-row>
        <table:table-row table:style-name="ro4">
          <table:table-cell table:number-columns-repeated="3"/>
          <table:table-cell table:style-name="ce502" table:number-columns-repeated="5"/>
          <table:table-cell table:number-columns-repeated="16376"/>
        </table:table-row>
        <table:table-row table:style-name="ro4" table:number-rows-repeated="986">
          <table:table-cell table:number-columns-repeated="16384"/>
        </table:table-row>
        <table:table-row table:style-name="ro8" table:number-rows-repeated="104757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m) Ke y Kwacc" table:style-name="ta24">
        <table:table-column table:style-name="co13" table:default-cell-style-name="ce485"/>
        <table:table-column table:style-name="co79" table:default-cell-style-name="ce485"/>
        <table:table-column table:style-name="co13" table:number-columns-repeated="24" table:default-cell-style-name="ce485"/>
        <table:table-column table:style-name="co14" table:number-columns-repeated="16358" table:default-cell-style-name="ce485"/>
        <table:table-row table:style-name="ro7">
          <table:table-cell table:number-columns-repeated="16384"/>
        </table:table-row>
        <table:table-row table:style-name="ro7">
          <table:table-cell/>
          <table:table-cell table:style-name="ce505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518"/>
          <table:covered-table-cell table:style-name="ce532"/>
          <table:table-cell/>
          <table:table-cell table:style-name="ce534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540"/>
          <table:covered-table-cell table:style-name="ce545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3">
          <table:table-cell/>
          <table:table-cell table:style-name="ce506" office:value-type="string" calcext:value-type="string">
            <text:p><text:span text:style-name="T16">Kert = Rfusa + </text:span><text:span text:style-name="T17">b</text:span><text:span text:style-name="T18">rl total </text:span><text:span text:style-name="T19">PERU</text:span><text:span text:style-name="T20">* (Rm- Rf )usa+ Rp </text:span><text:span text:style-name="T19">PERU </text:span><text:span text:style-name="T20">                                                </text:span></text:p>
          </table:table-cell>
          <table:table-cell table:number-columns-repeated="4"/>
          <table:table-cell table:style-name="ce535" office:value-type="string" calcext:value-type="string">
            <text:p><text:span text:style-name="T16">Kwacc rt= E/V * Kert + D/V * K</text:span><text:span text:style-name="T35">d </text:span><text:span text:style-name="T36">* (1 – t)</text:span><text:span text:style-name="T37">                                                             </text:span>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13">
          <table:table-cell/>
          <table:table-cell table:style-name="ce507" office:value-type="string" calcext:value-type="string">
            <text:p>Donde:</text:p>
          </table:table-cell>
          <table:table-cell table:number-columns-repeated="4"/>
          <table:table-cell table:style-name="ce507" office:value-type="string" calcext:value-type="string">
            <text:p>Dónde:</text:p>
          </table:table-cell>
          <table:table-cell table:number-columns-repeated="16377"/>
        </table:table-row>
        <table:table-row table:style-name="ro13">
          <table:table-cell/>
          <table:table-cell table:style-name="ce508" office:value-type="string" calcext:value-type="string">
            <text:p>Rfusa =</text:p>
          </table:table-cell>
          <table:table-cell table:style-name="ce519" office:value-type="percentage" office:value="0.0495" calcext:value-type="percentage">
            <text:p>4.95 %</text:p>
          </table:table-cell>
          <table:table-cell table:number-columns-repeated="3"/>
          <table:table-cell table:style-name="ce536" office:value-type="string" calcext:value-type="string">
            <text:p><text:span text:style-name="T16">E/V*</text:span><text:span text:style-name="T38"> </text:span><text:span text:style-name="T39">=</text:span></text:p>
          </table:table-cell>
          <table:table-cell table:style-name="ce541" table:formula="of:=0.6" office:value-type="float" office:value="0.6" calcext:value-type="float">
            <text:p>0.6</text:p>
          </table:table-cell>
          <table:table-cell table:number-columns-repeated="16376"/>
        </table:table-row>
        <table:table-row table:style-name="ro13">
          <table:table-cell/>
          <table:table-cell table:style-name="ce509" office:value-type="string" calcext:value-type="string">
            <text:p><text:span text:style-name="T21">b</text:span><text:span text:style-name="T13">rl total</text:span><text:span text:style-name="T22"> PERU</text:span><text:span text:style-name="T23">= </text:span></text:p>
          </table:table-cell>
          <table:table-cell table:style-name="ce520" table:formula="of:=[.C22]" office:value-type="float" office:value="3.92666666666667" calcext:value-type="float">
            <text:p><text:s/>3.93 </text:p>
          </table:table-cell>
          <table:table-cell table:number-columns-repeated="3"/>
          <table:table-cell table:style-name="ce537" office:value-type="string" calcext:value-type="string">
            <text:p>Kert =</text:p>
          </table:table-cell>
          <table:table-cell table:style-name="ce521" table:formula="of:=[.C12]" office:value-type="percentage" office:value="0.249097333333333" calcext:value-type="percentage">
            <text:p>24.91 %</text:p>
          </table:table-cell>
          <table:table-cell table:number-columns-repeated="16376"/>
        </table:table-row>
        <table:table-row table:style-name="ro13">
          <table:table-cell/>
          <table:table-cell table:style-name="ce510" office:value-type="string" calcext:value-type="string">
            <text:p>(Rm – Rf)usa =</text:p>
          </table:table-cell>
          <table:table-cell table:style-name="ce521" office:value-type="percentage" office:value="0.0464" calcext:value-type="percentage">
            <text:p>4.64 %</text:p>
          </table:table-cell>
          <table:table-cell table:number-columns-repeated="3"/>
          <table:table-cell table:style-name="ce537" office:value-type="string" calcext:value-type="string">
            <text:p><text:span text:style-name="T16">D/V*</text:span><text:span text:style-name="T38"> </text:span><text:span text:style-name="T39">= </text:span></text:p>
          </table:table-cell>
          <table:table-cell table:style-name="ce528" table:formula="of:=1-[.H7]" office:value-type="float" office:value="0.4" calcext:value-type="float">
            <text:p>0.4</text:p>
          </table:table-cell>
          <table:table-cell table:number-columns-repeated="16376"/>
        </table:table-row>
        <table:table-row table:style-name="ro13">
          <table:table-cell/>
          <table:table-cell table:style-name="ce510" office:value-type="string" calcext:value-type="string">
            <text:p>Rp = </text:p>
          </table:table-cell>
          <table:table-cell table:style-name="ce521" table:formula="of:=[$'l.) Ku'.C10]" office:value-type="percentage" office:value="0.0174" calcext:value-type="percentage">
            <text:p>1.74 %</text:p>
          </table:table-cell>
          <table:table-cell table:number-columns-repeated="3"/>
          <table:table-cell table:style-name="ce537" office:value-type="string" calcext:value-type="string">
            <text:p><text:span text:style-name="T16">K</text:span><text:span text:style-name="T35">d </text:span><text:span text:style-name="T36">=</text:span><text:span text:style-name="T37"> </text:span></text:p>
          </table:table-cell>
          <table:table-cell table:style-name="ce542" table:formula="of:=[$'j) cronograma deuda'.E7]" office:value-type="percentage" office:value="0.23" calcext:value-type="percentage">
            <text:p>23 %</text:p>
          </table:table-cell>
          <table:table-cell table:number-columns-repeated="16376"/>
        </table:table-row>
        <table:table-row table:style-name="ro13">
          <table:table-cell/>
          <table:table-cell table:style-name="ce511"/>
          <table:table-cell table:style-name="ce522"/>
          <table:table-cell table:number-columns-repeated="3"/>
          <table:table-cell table:style-name="ce537" office:value-type="string" calcext:value-type="string">
            <text:p><text:span text:style-name="T16">t* </text:span><text:span text:style-name="T40">= </text:span></text:p>
          </table:table-cell>
          <table:table-cell table:style-name="ce542" table:formula="of:=['file:///C:/Users/User/Downloads/MERMELADA%20DE%20ROCOTO%20III.xlsx'#$Resumen.H11]" office:value-type="percentage" office:value="0.1" calcext:value-type="percentage">
            <text:p>10 %</text:p>
          </table:table-cell>
          <table:table-cell table:style-name="ce530" office:value-type="string" calcext:value-type="string">
            <text:p>Menor a 150 UIT</text:p>
          </table:table-cell>
          <table:table-cell table:style-name="ce530"/>
          <table:table-cell office:value-type="string" calcext:value-type="string">
            <text:p>real</text:p>
          </table:table-cell>
          <table:table-cell table:number-columns-repeated="16373"/>
        </table:table-row>
        <table:table-row table:style-name="ro13">
          <table:table-cell/>
          <table:table-cell table:style-name="ce512" office:value-type="string" calcext:value-type="string">
            <text:p>Kert =</text:p>
          </table:table-cell>
          <table:table-cell table:style-name="ce523" table:formula="of:=[.C7]+[.C8]*([.C9])+[.C10]" office:value-type="percentage" office:value="0.249097333333333" calcext:value-type="percentage">
            <text:p>24.91 %</text:p>
          </table:table-cell>
          <table:table-cell table:style-name="ce530" office:value-type="string" calcext:value-type="string">
            <text:p>dolares nominales</text:p>
          </table:table-cell>
          <table:table-cell table:number-columns-repeated="2"/>
          <table:table-cell table:style-name="ce538"/>
          <table:table-cell table:style-name="ce543"/>
          <table:table-cell table:number-columns-repeated="16376"/>
        </table:table-row>
        <table:table-row table:style-name="ro12">
          <table:table-cell/>
          <table:table-cell table:style-name="ce507"/>
          <table:table-cell table:style-name="ce524"/>
          <table:table-cell table:number-columns-repeated="3"/>
          <table:table-cell table:style-name="ce539" office:value-type="string" calcext:value-type="string">
            <text:p>Kwacc</text:p>
          </table:table-cell>
          <table:table-cell table:style-name="ce544" table:formula="of:=[.H7]*[.H8]+[.H9]*[.H10]*(1-[.H11])" office:value-type="percentage" office:value="0.2322584" calcext:value-type="percentage">
            <text:p>23.23 %</text:p>
          </table:table-cell>
          <table:table-cell table:style-name="ce530" office:value-type="string" calcext:value-type="string">
            <text:p>dolares nominales</text:p>
          </table:table-cell>
          <table:table-cell table:number-columns-repeated="16375"/>
        </table:table-row>
        <table:table-row table:style-name="ro12">
          <table:table-cell/>
          <table:table-cell table:style-name="ce513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525"/>
          <table:covered-table-cell table:style-name="ce533"/>
          <table:table-cell/>
          <table:table-cell table:style-name="ce514"/>
          <table:table-cell table:number-columns-repeated="16377"/>
        </table:table-row>
        <table:table-row table:style-name="ro11">
          <table:table-cell/>
          <table:table-cell table:style-name="ce514" office:value-type="string" calcext:value-type="string">
            <text:p><text:span text:style-name="T24">             b</text:span><text:span text:style-name="T25">rl total  </text:span><text:span text:style-name="T26">=  </text:span><text:span text:style-name="T27">b</text:span><text:span text:style-name="T25">u total ME *</text:span><text:span text:style-name="T26">( 1+(D/E*)*( 1-t))</text:span><text:span text:style-name="T28">PERU                                                                             </text:span><text:span text:style-name="T29"> </text:span></text:p>
          </table:table-cell>
          <table:table-cell table:number-columns-repeated="16382"/>
        </table:table-row>
        <table:table-row table:style-name="ro13">
          <table:table-cell/>
          <table:table-cell table:style-name="ce507" office:value-type="string" calcext:value-type="string">
            <text:p><text:span text:style-name="T11">Donde:</text:span><text:span text:style-name="T30">         </text:span><text:span text:style-name="T12">                                                                      </text:span></text:p>
          </table:table-cell>
          <table:table-cell table:number-columns-repeated="16382"/>
        </table:table-row>
        <table:table-row table:style-name="ro13">
          <table:table-cell/>
          <table:table-cell table:style-name="ce515"/>
          <table:table-cell table:number-columns-repeated="16382"/>
        </table:table-row>
        <table:table-row table:style-name="ro28">
          <table:table-cell/>
          <table:table-cell table:style-name="ce516" office:value-type="string" calcext:value-type="string">
            <text:p><text:span text:style-name="T21">b</text:span><text:span text:style-name="T31">u total ME </text:span><text:span text:style-name="T32">= </text:span></text:p>
          </table:table-cell>
          <table:table-cell table:style-name="ce526" table:formula="of:=[$'l.) Ku'.C8]" office:value-type="float" office:value="3.8" calcext:value-type="float">
            <text:p>3.8</text:p>
          </table:table-cell>
          <table:table-cell table:number-columns-repeated="16381"/>
        </table:table-row>
        <table:table-row table:style-name="ro11">
          <table:table-cell/>
          <table:table-cell table:style-name="ce510" office:value-type="string" calcext:value-type="string">
            <text:p><text:span text:style-name="T11">D/E*</text:span><text:span text:style-name="T33">PERU </text:span><text:span text:style-name="T34">= </text:span></text:p>
          </table:table-cell>
          <table:table-cell table:style-name="ce527" table:formula="of:=0.4/0.6" office:value-type="float" office:value="0.666666666666667" calcext:value-type="float">
            <text:p>0.67</text:p>
          </table:table-cell>
          <table:table-cell table:number-columns-repeated="16381"/>
        </table:table-row>
        <table:table-row table:style-name="ro13">
          <table:table-cell/>
          <table:table-cell table:style-name="ce510" office:value-type="string" calcext:value-type="string">
            <text:p>t* = </text:p>
          </table:table-cell>
          <table:table-cell table:style-name="ce528" office:value-type="float" office:value="0.1" calcext:value-type="float">
            <text:p>0.1</text:p>
          </table:table-cell>
          <table:table-cell table:style-name="ce531"/>
          <table:table-cell table:number-columns-repeated="16380"/>
        </table:table-row>
        <table:table-row table:style-name="ro4">
          <table:table-cell/>
          <table:table-cell table:style-name="ce492"/>
          <table:table-cell table:style-name="ce499"/>
          <table:table-cell table:number-columns-repeated="16381"/>
        </table:table-row>
        <table:table-row table:style-name="ro13">
          <table:table-cell/>
          <table:table-cell table:style-name="ce517" office:value-type="string" calcext:value-type="string">
            <text:p>βrl total perú </text:p>
          </table:table-cell>
          <table:table-cell table:style-name="ce529" table:formula="of:=[.C18]*(1+[.C20]*(1-[.C19]))" office:value-type="float" office:value="3.92666666666667" calcext:value-type="float">
            <text:p><text:s/>3.93 </text:p>
          </table:table-cell>
          <table:table-cell table:number-columns-repeated="16381"/>
        </table:table-row>
        <table:table-row table:style-name="ro4" table:number-rows-repeated="978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Hlk37002392" table:base-cell-address="$Hoja1.$A$1" table:cell-range-address="$'m) Ke y Kwacc'.$B$15"/>
          <table:named-range table:name="_Hlk38462990" table:base-cell-address="$Hoja1.$A$1" table:cell-range-address="$'m) Ke y Kwacc'.$G$14"/>
        </table:named-expressions>
      </table:table>
      <table:table table:name="Rentabilidad" table:style-name="ta25">
        <office:forms form:automatic-focus="false" form:apply-design-mode="false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38" table:default-cell-style-name="ce546"/>
        <table:table-column table:style-name="co83" table:default-cell-style-name="ce546"/>
        <table:table-column table:style-name="co61" table:number-columns-repeated="245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48" table:default-cell-style-name="ce546"/>
        <table:table-column table:style-name="co80" table:default-cell-style-name="ce546"/>
        <table:table-column table:style-name="co81" table:default-cell-style-name="ce546"/>
        <table:table-column table:style-name="co82" table:default-cell-style-name="ce546"/>
        <table:table-column table:style-name="co48" table:default-cell-style-name="ce546"/>
        <table:table-column table:style-name="co61" table:number-columns-repeated="2" table:default-cell-style-name="ce546"/>
        <table:table-column table:style-name="co84" table:default-cell-style-name="ce546"/>
        <table:table-column table:style-name="co33" table:default-cell-style-name="ce546"/>
        <table:table-column table:style-name="co61" table:number-columns-repeated="254" table:default-cell-style-name="ce546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547"/>
          <table:table-cell table:style-name="ce549" office:value-type="string" calcext:value-type="string" table:number-columns-spanned="2" table:number-rows-spanned="1">
            <text:p>EMPRESA NO DIVERSIFICADA</text:p>
          </table:table-cell>
          <table:covered-table-cell table:style-name="ce556"/>
          <table:table-cell table:style-name="ce547" table:number-columns-repeated="2"/>
          <table:table-cell table:number-columns-repeated="16378"/>
        </table:table-row>
        <table:table-row table:style-name="ro1">
          <table:table-cell/>
          <table:table-cell table:style-name="ce547" table:number-columns-repeated="5"/>
          <table:table-cell table:number-columns-repeated="16378"/>
        </table:table-row>
        <table:table-row table:style-name="ro29">
          <table:table-cell/>
          <table:table-cell table:style-name="ce548"/>
          <table:table-cell table:style-name="ce550" office:value-type="string" calcext:value-type="string" table:number-columns-spanned="2" table:number-rows-spanned="1">
            <text:p>EVALUACIÓN ECONÓMICA</text:p>
          </table:table-cell>
          <table:covered-table-cell table:style-name="ce557"/>
          <table:table-cell table:style-name="ce547" table:number-columns-repeated="2"/>
          <table:table-cell/>
          <table:table-cell table:style-name="ce575" office:value-type="string" calcext:value-type="string">
            <text:p>Ki<text:span text:style-name="T41"> real</text:span><text:span text:style-name="T42">  =  </text:span><text:span text:style-name="T43">(1+ Ki </text:span><text:span text:style-name="T44">nominal</text:span><text:span text:style-name="T45">) - 1                                                                               </text:span></text:p>
          </table:table-cell>
          <table:table-cell table:number-columns-repeated="16376"/>
        </table:table-row>
        <table:table-row table:style-name="ro30">
          <table:table-cell/>
          <table:table-cell table:style-name="ce548"/>
          <table:table-cell table:style-name="ce551" table:number-columns-repeated="2"/>
          <table:table-cell table:style-name="ce547" table:number-columns-repeated="2"/>
          <table:table-cell/>
          <table:table-cell table:style-name="ce575"/>
          <table:table-cell table:style-name="ce577" office:value-type="string" calcext:value-type="string" table:number-columns-spanned="2" table:number-rows-spanned="1">
            <text:p>( 1 + dev)</text:p>
          </table:table-cell>
          <table:covered-table-cell table:style-name="ce578"/>
          <table:table-cell table:number-columns-repeated="16374"/>
        </table:table-row>
        <table:table-row table:style-name="ro30">
          <table:table-cell/>
          <table:table-cell table:style-name="ce548"/>
          <table:table-cell table:style-name="ce552" office:value-type="string" calcext:value-type="string">
            <text:p>Tasas y Criterios</text:p>
          </table:table-cell>
          <table:table-cell table:style-name="ce552" office:value-type="string" calcext:value-type="string">
            <text:p>Valor</text:p>
          </table:table-cell>
          <table:table-cell table:style-name="ce570"/>
          <table:table-cell table:style-name="ce547"/>
          <table:table-cell/>
          <table:table-cell table:style-name="ce575"/>
          <table:table-cell table:number-columns-repeated="16376"/>
        </table:table-row>
        <table:table-row table:style-name="ro30">
          <table:table-cell/>
          <table:table-cell table:style-name="ce547"/>
          <table:table-cell table:style-name="ce553" office:value-type="string" calcext:value-type="string">
            <text:p>Kurt nominal en dólares</text:p>
          </table:table-cell>
          <table:table-cell table:style-name="ce558" table:formula="of:=['file:///TESIS%20DOCTORADO%20UNFV%202021/PROYECTOS%20APLICATIVOS%20POSGRADO/COJINES%20BORDADOS/COJINES%20BORDADOS%20tesis.xlsx'#$Ku.C12]" office:value-type="percentage" office:value="0.24322" calcext:value-type="percentage">
            <text:p>24.32 %</text:p>
          </table:table-cell>
          <table:table-cell table:style-name="ce547" table:number-columns-repeated="2"/>
          <table:table-cell/>
          <table:table-cell table:style-name="ce576"/>
          <table:table-cell table:number-columns-repeated="16376"/>
        </table:table-row>
        <table:table-row table:style-name="ro30">
          <table:table-cell/>
          <table:table-cell table:style-name="ce547"/>
          <table:table-cell table:style-name="ce553" office:value-type="string" calcext:value-type="string">
            <text:p>Devaluación del dólar</text:p>
          </table:table-cell>
          <table:table-cell table:style-name="ce559" table:formula="of:=[$'j) cronograma deuda'.E9]" office:value-type="percentage" office:value="0.0270270270270269" calcext:value-type="percentage">
            <text:p>2.70 %</text:p>
          </table:table-cell>
          <table:table-cell table:style-name="ce547" table:number-columns-repeated="2"/>
          <table:table-cell/>
          <table:table-cell table:style-name="ce575"/>
          <table:table-cell table:number-columns-repeated="16376"/>
        </table:table-row>
        <table:table-row table:style-name="ro30">
          <table:table-cell/>
          <table:table-cell table:style-name="ce547"/>
          <table:table-cell table:style-name="ce553" office:value-type="string" calcext:value-type="string">
            <text:p>Kurt <text:s/>real</text:p>
          </table:table-cell>
          <table:table-cell table:style-name="ce560" table:formula="of:=((1+[.D8])/(1+[.D9]))-1" office:value-type="percentage" office:value="0.210503684210526" calcext:value-type="percentage">
            <text:p>21.05 %</text:p>
          </table:table-cell>
          <table:table-cell table:style-name="ce547" table:number-columns-repeated="2"/>
          <table:table-cell/>
          <table:table-cell table:style-name="ce575"/>
          <table:table-cell table:number-columns-repeated="16376"/>
        </table:table-row>
        <table:table-row table:style-name="ro1">
          <table:table-cell/>
          <table:table-cell table:style-name="ce547" table:number-columns-repeated="2"/>
          <table:table-cell table:style-name="ce561"/>
          <table:table-cell table:style-name="ce547" table:number-columns-repeated="2"/>
          <table:table-cell table:number-columns-repeated="16378"/>
        </table:table-row>
        <table:table-row table:style-name="ro1">
          <table:table-cell/>
          <table:table-cell table:style-name="ce547"/>
          <table:table-cell table:style-name="ce554" office:value-type="string" calcext:value-type="string">
            <text:p>VANE =</text:p>
          </table:table-cell>
          <table:table-cell table:style-name="ce562" table:formula="of:=NPV([.D10];[$'k) Flujos de Caja'.E17:.G17])+[$'k) Flujos de Caja'.D17]" office:value-type="float" office:value="-12202.831216203" calcext:value-type="float">
            <text:p><text:s/>-12,203 </text:p>
          </table:table-cell>
          <table:table-cell table:style-name="ce571" office:value-type="string" calcext:value-type="string">
            <text:p>dólares</text:p>
          </table:table-cell>
          <table:table-cell table:style-name="ce555"/>
          <table:table-cell office:value-type="string" calcext:value-type="string">
            <text:p>Nos faltarian 12,203 dolares para que el proyecto sea rentable (VAN=0)</text:p>
          </table:table-cell>
          <table:table-cell table:number-columns-repeated="16377"/>
        </table:table-row>
        <table:table-row table:style-name="ro1">
          <table:table-cell/>
          <table:table-cell table:style-name="ce547"/>
          <table:table-cell table:style-name="ce555"/>
          <table:table-cell table:style-name="ce563"/>
          <table:table-cell table:style-name="ce572"/>
          <table:table-cell table:style-name="ce555"/>
          <table:table-cell office:value-type="string" calcext:value-type="string">
            <text:p>sin apalancamieto</text:p>
          </table:table-cell>
          <table:table-cell table:number-columns-repeated="16377"/>
        </table:table-row>
        <table:table-row table:style-name="ro1">
          <table:table-cell/>
          <table:table-cell table:style-name="ce547"/>
          <table:table-cell table:style-name="ce554" office:value-type="string" calcext:value-type="string">
            <text:p>TIRE =</text:p>
          </table:table-cell>
          <table:table-cell table:style-name="ce564" table:formula="of:=IRR([$'k) Flujos de Caja'.D17:.G17])" office:value-type="string" office:string-value="" calcext:value-type="error">
            <text:p>Err:523</text:p>
          </table:table-cell>
          <table:table-cell table:style-name="ce573" office:value-type="string" calcext:value-type="string">
            <text:p>anual</text:p>
          </table:table-cell>
          <table:table-cell table:style-name="ce555"/>
          <table:table-cell table:number-columns-repeated="16378"/>
        </table:table-row>
        <table:table-row table:style-name="ro1">
          <table:table-cell/>
          <table:table-cell table:style-name="ce547" table:number-columns-repeated="5"/>
          <table:table-cell table:number-columns-repeated="16378"/>
        </table:table-row>
        <table:table-row table:style-name="ro1">
          <table:table-cell/>
          <table:table-cell table:style-name="ce548"/>
          <table:table-cell table:style-name="ce550" office:value-type="string" calcext:value-type="string" table:number-columns-spanned="2" table:number-rows-spanned="1">
            <text:p>EVALUACIÓN FINANCIERA</text:p>
          </table:table-cell>
          <table:covered-table-cell table:style-name="ce557"/>
          <table:table-cell table:style-name="ce547" table:number-columns-repeated="2"/>
          <table:table-cell table:number-columns-repeated="16378"/>
        </table:table-row>
        <table:table-row table:style-name="ro1">
          <table:table-cell/>
          <table:table-cell table:style-name="ce548"/>
          <table:table-cell table:style-name="ce551" table:number-columns-repeated="2"/>
          <table:table-cell table:style-name="ce547" table:number-columns-repeated="2"/>
          <table:table-cell table:number-columns-repeated="16378"/>
        </table:table-row>
        <table:table-row table:style-name="ro1">
          <table:table-cell/>
          <table:table-cell table:style-name="ce547"/>
          <table:table-cell table:style-name="ce552" office:value-type="string" calcext:value-type="string">
            <text:p>Tasas y Criterios</text:p>
          </table:table-cell>
          <table:table-cell table:style-name="ce552" office:value-type="string" calcext:value-type="string">
            <text:p>Valor</text:p>
          </table:table-cell>
          <table:table-cell table:style-name="ce570"/>
          <table:table-cell table:style-name="ce547"/>
          <table:table-cell table:number-columns-repeated="16378"/>
        </table:table-row>
        <table:table-row table:style-name="ro7">
          <table:table-cell/>
          <table:table-cell table:style-name="ce547"/>
          <table:table-cell table:style-name="ce553" office:value-type="string" calcext:value-type="string">
            <text:p>TEA nominal</text:p>
          </table:table-cell>
          <table:table-cell table:style-name="ce565" table:formula="of:=[$'m) Ke y Kwacc'.H10]" office:value-type="percentage" office:value="0.23" calcext:value-type="percentage">
            <text:p>23.00 %</text:p>
          </table:table-cell>
          <table:table-cell table:style-name="ce547" table:number-columns-repeated="2"/>
          <table:table-cell table:number-columns-repeated="16378"/>
        </table:table-row>
        <table:table-row table:style-name="ro12">
          <table:table-cell/>
          <table:table-cell table:style-name="ce547"/>
          <table:table-cell table:style-name="ce553" office:value-type="string" calcext:value-type="string">
            <text:p>TEA real</text:p>
          </table:table-cell>
          <table:table-cell table:style-name="ce566" table:formula="of:=((1+[.D19])/(1+[.D9])) -1" office:value-type="percentage" office:value="0.197631578947368" calcext:value-type="percentage">
            <text:p>19.8%</text:p>
          </table:table-cell>
          <table:table-cell table:style-name="ce547" table:number-columns-repeated="2"/>
          <table:table-cell table:number-columns-repeated="16378"/>
        </table:table-row>
        <table:table-row table:style-name="ro9">
          <table:table-cell/>
          <table:table-cell table:style-name="ce547" table:number-columns-repeated="5"/>
          <table:table-cell table:number-columns-repeated="16378"/>
        </table:table-row>
        <table:table-row table:style-name="ro1">
          <table:table-cell/>
          <table:table-cell table:style-name="ce547"/>
          <table:table-cell table:style-name="ce553" office:value-type="string" calcext:value-type="string">
            <text:p>VAEFI =</text:p>
          </table:table-cell>
          <table:table-cell table:style-name="ce567" table:formula="of:=NPV([.D20];[$'k) Flujos de Caja'.E21])" office:value-type="float" office:value="19.4473774264372" calcext:value-type="float">
            <text:p>19.45 <text:s text:c="2"/></text:p>
          </table:table-cell>
          <table:table-cell table:style-name="ce547" table:number-columns-repeated="2"/>
          <table:table-cell table:number-columns-repeated="16378"/>
        </table:table-row>
        <table:table-row table:style-name="ro31">
          <table:table-cell/>
          <table:table-cell table:style-name="ce547" table:number-columns-repeated="5"/>
          <table:table-cell table:number-columns-repeated="16378"/>
        </table:table-row>
        <table:table-row table:style-name="ro1">
          <table:table-cell/>
          <table:table-cell table:style-name="ce547"/>
          <table:table-cell table:style-name="ce554" office:value-type="string" calcext:value-type="string">
            <text:p>VAN Ajustado =VANF=</text:p>
          </table:table-cell>
          <table:table-cell table:style-name="ce568" table:formula="of:=[.D12]+[.D22]" office:value-type="float" office:value="-12183.3838387765" calcext:value-type="float">
            <text:p>-12,183 <text:s text:c="3"/></text:p>
          </table:table-cell>
          <table:table-cell table:style-name="ce571" office:value-type="string" calcext:value-type="string">
            <text:p>dólares</text:p>
          </table:table-cell>
          <table:table-cell table:style-name="ce555"/>
          <table:table-cell office:value-type="string" calcext:value-type="string">
            <text:p>Nos faltarian 12,183 dolares para que el proyecto sea rentable (VAN=0)</text:p>
          </table:table-cell>
          <table:table-cell table:number-columns-repeated="16377"/>
        </table:table-row>
        <table:table-row table:style-name="ro1">
          <table:table-cell/>
          <table:table-cell table:style-name="ce547"/>
          <table:table-cell table:style-name="ce555" table:number-columns-repeated="2"/>
          <table:table-cell table:style-name="ce572"/>
          <table:table-cell table:style-name="ce555"/>
          <table:table-cell office:value-type="string" calcext:value-type="string">
            <text:p>con apalancamieto</text:p>
          </table:table-cell>
          <table:table-cell table:number-columns-repeated="16377"/>
        </table:table-row>
        <table:table-row table:style-name="ro1">
          <table:table-cell/>
          <table:table-cell table:style-name="ce547"/>
          <table:table-cell table:style-name="ce554" office:value-type="string" calcext:value-type="string">
            <text:p>TIRF Ajustado =</text:p>
          </table:table-cell>
          <table:table-cell table:style-name="ce569" table:formula="of:=IRR([$'k) Flujos de Caja'.D26:.G26])" office:value-type="string" office:string-value="" calcext:value-type="error">
            <text:p>Err:523</text:p>
          </table:table-cell>
          <table:table-cell table:style-name="ce573" office:value-type="string" calcext:value-type="string">
            <text:p>anual</text:p>
          </table:table-cell>
          <table:table-cell table:style-name="ce574"/>
          <table:table-cell table:number-columns-repeated="16378"/>
        </table:table-row>
        <table:table-row table:style-name="ro1">
          <table:table-cell/>
          <table:table-cell table:style-name="ce547" table:number-columns-repeated="5"/>
          <table:table-cell table:number-columns-repeated="16378"/>
        </table:table-row>
        <table:table-row table:style-name="ro1">
          <table:table-cell table:number-columns-repeated="2"/>
          <table:table-cell table:style-name="ce547" table:number-columns-repeated="4"/>
          <table:table-cell table:number-columns-repeated="1637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nsibilidad" table:style-name="ta26">
        <table:table-column table:style-name="co24" table:default-cell-style-name="ce579"/>
        <table:table-column table:style-name="co13" table:number-columns-repeated="2" table:default-cell-style-name="ce579"/>
        <table:table-column table:style-name="co62" table:default-cell-style-name="ce579"/>
        <table:table-column table:style-name="co85" table:default-cell-style-name="ce579"/>
        <table:table-column table:style-name="co13" table:number-columns-repeated="21" table:default-cell-style-name="ce579"/>
        <table:table-column table:style-name="co14" table:number-columns-repeated="16358" table:default-cell-style-name="ce579"/>
        <table:table-row table:style-name="ro7">
          <table:table-cell/>
          <table:table-cell table:style-name="ce583" office:value-type="string" calcext:value-type="string">
            <text:p>Variable</text:p>
          </table:table-cell>
          <table:table-cell table:style-name="ce592" office:value-type="string" calcext:value-type="string">
            <text:p>VANE</text:p>
          </table:table-cell>
          <table:table-cell table:style-name="ce604" office:value-type="string" calcext:value-type="string">
            <text:p>TIRE</text:p>
          </table:table-cell>
          <table:table-cell table:style-name="ce592" office:value-type="string" calcext:value-type="string">
            <text:p>VANF</text:p>
          </table:table-cell>
          <table:table-cell table:style-name="ce620" office:value-type="string" calcext:value-type="string">
            <text:p>TIRF</text:p>
          </table:table-cell>
          <table:table-cell/>
          <table:table-cell>
            <draw:custom-shape table:end-cell-address="Sensibilidad.S11" table:end-x="0.21cm" table:end-y="0.343cm" draw:z-index="0" draw:name="Rectángulo redondeado 1" draw:style-name="gr9" draw:text-style-name="P9" svg:width="21.033cm" svg:height="5.37cm" svg:x="1.719cm" svg:y="0.159cm">
              <text:p text:style-name="P8"><text:span text:style-name="T1">En el primer cuadro, que es un referente a la sensibilidad de valor de venta donde se muestra que el valor real con el que se desarrolla el proyecto es de $ 28.50, llegando a un VANE de 20.396, TIRE de 120.9%, VANF de 20.419 y un TIRF de 121.1%. Posteriormente se puede apreciar la viabilidad (VANE) expresado en 0, TIRE en 26.68%, VANF 23 y TIRF en 29.96% lo cual se halla cuando determinamos el valor de venta en $ 23.00 dólares y a su vez este valor se considera como un valor pesimista. Sin embargo, también se muestra un valor optimista que sería por el valor de $29.00 dólares. Es decir, si es que el precio del cojín varia, entonces el costo de mano obra y lana de ovino se mantiene constante. (ceteris paribus). En este cuadro se puede determinar que del valor de venta normal que es $28.50, la empresa tiene la opción de reducir este valor hasta un $ 23.00, considerándose que este factor sufre una variación del 19.29%.</text:span></text:p>
              <text:p text:style-name="P8"><text:span text:style-name="T1"/></text:p>
              <text:p text:style-name="P8"><text:span text:style-name="T1"/></text:p>
              <text:p text:style-name="P8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6"/>
        </table:table-row>
        <table:table-row table:style-name="ro4">
          <table:table-cell/>
          <table:table-cell table:style-name="ce584"/>
          <table:table-cell table:style-name="ce593" table:formula="of:=[4]resumen!vane" office:value-type="string" office:string-value="" calcext:value-type="error">
            <text:p>#¿NOMBRE?</text:p>
          </table:table-cell>
          <table:table-cell table:style-name="ce605" table:formula="of:=['file:///TESIS%20DOCTORADO%20UNFV%202021/PROYECTOS%20APLICATIVOS%20POSGRADO/COJINES%20BORDADOS/COJINES%20BORDADOS%20tesis.xlsx'#$Resumen.C15]" office:value-type="string" office:string-value="" calcext:value-type="error">
            <text:p>#¡REF!</text:p>
          </table:table-cell>
          <table:table-cell table:style-name="ce616" table:formula="of:=['file:///TESIS%20DOCTORADO%20UNFV%202021/PROYECTOS%20APLICATIVOS%20POSGRADO/COJINES%20BORDADOS/COJINES%20BORDADOS%20tesis.xlsx'#$Resumen.E13]" office:value-type="string" office:string-value="" calcext:value-type="error">
            <text:p>#¡REF!</text:p>
          </table:table-cell>
          <table:table-cell table:style-name="ce621" table:formula="of:=['file:///TESIS%20DOCTORADO%20UNFV%202021/PROYECTOS%20APLICATIVOS%20POSGRADO/COJINES%20BORDADOS/COJINES%20BORDADOS%20tesis.xlsx'#$Resumen.E15]" office:value-type="string" office:string-value="" calcext:value-type="error">
            <text:p>#¡REF!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7">
          <table:table-cell/>
          <table:table-cell table:style-name="ce585" office:value-type="string" calcext:value-type="string">
            <text:p><text:span text:style-name="T46">1. </text:span><text:span text:style-name="T47">Sensibilidad de</text:span><text:span text:style-name="T48"> valor de venta</text:span></text:p>
          </table:table-cell>
          <table:table-cell table:style-name="ce585" table:number-columns-repeated="4"/>
          <table:table-cell table:number-columns-repeated="16378"/>
        </table:table-row>
        <table:table-row table:style-name="ro24">
          <table:table-cell/>
          <table:table-cell table:style-name="ce586" office:value-type="string" calcext:value-type="string">
            <text:p>Valor de Venta</text:p>
          </table:table-cell>
          <table:table-cell table:style-name="ce594" office:value-type="string" calcext:value-type="string">
            <text:p>VANE</text:p>
          </table:table-cell>
          <table:table-cell table:style-name="ce606" office:value-type="string" calcext:value-type="string">
            <text:p>TIRE</text:p>
          </table:table-cell>
          <table:table-cell table:style-name="ce594" office:value-type="string" calcext:value-type="string">
            <text:p>VANF</text:p>
          </table:table-cell>
          <table:table-cell table:style-name="ce622" office:value-type="string" calcext:value-type="string">
            <text:p>TIRF</text:p>
          </table:table-cell>
          <table:table-cell table:number-columns-repeated="16378"/>
        </table:table-row>
        <table:table-row table:style-name="ro4">
          <table:table-cell table:style-name="ce580" table:formula="of:=([.B9]-[.B11])/[.B9]*100" office:value-type="float" office:value="19.2894408531298" calcext:value-type="float">
            <text:p>19.29</text:p>
          </table:table-cell>
          <table:table-cell table:style-name="ce88" office:value-type="currency" office:currency="$" office:value="30" calcext:value-type="currency">
            <text:p><text:s/>$30.00 </text:p>
          </table:table-cell>
          <table:table-cell table:style-name="ce595" office:value-type="float" office:value="25961.1952901452" calcext:value-type="float">
            <text:p>25,961</text:p>
          </table:table-cell>
          <table:table-cell table:style-name="ce607" office:value-type="percentage" office:value="1.48765566426033" calcext:value-type="percentage">
            <text:p>149 %</text:p>
          </table:table-cell>
          <table:table-cell table:style-name="ce595" office:value-type="float" office:value="25984.5054702973" calcext:value-type="float">
            <text:p>25,985</text:p>
          </table:table-cell>
          <table:table-cell table:style-name="ce623" office:value-type="percentage" office:value="1.49041353345213" calcext:value-type="percentage">
            <text:p>149 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29.5" calcext:value-type="currency">
            <text:p><text:s/>$29.50 </text:p>
          </table:table-cell>
          <table:table-cell table:style-name="ce596" office:value-type="float" office:value="24106.159205489" calcext:value-type="float">
            <text:p>24,106</text:p>
          </table:table-cell>
          <table:table-cell table:style-name="ce608" office:value-type="percentage" office:value="1.39385812279058" calcext:value-type="percentage">
            <text:p>139 %</text:p>
          </table:table-cell>
          <table:table-cell table:style-name="ce596" office:value-type="float" office:value="24129.4693856411" calcext:value-type="float">
            <text:p>24,129</text:p>
          </table:table-cell>
          <table:table-cell table:style-name="ce624" office:value-type="percentage" office:value="1.39650593198535" calcext:value-type="percentage">
            <text:p>140 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29" calcext:value-type="currency">
            <text:p><text:s/>$29.00 </text:p>
          </table:table-cell>
          <table:table-cell table:style-name="ce593" office:value-type="float" office:value="22251.1231208328" calcext:value-type="float">
            <text:p>22,251</text:p>
          </table:table-cell>
          <table:table-cell table:style-name="ce605" office:value-type="percentage" office:value="1.3009791047182" calcext:value-type="percentage">
            <text:p>130.10 %</text:p>
          </table:table-cell>
          <table:table-cell table:style-name="ce616" office:value-type="float" office:value="22274.4333009849" calcext:value-type="float">
            <text:p>22,274.4</text:p>
          </table:table-cell>
          <table:table-cell table:style-name="ce621" office:value-type="percentage" office:value="1.30351278503754" calcext:value-type="percentage">
            <text:p>130.35 %</text:p>
          </table:table-cell>
          <table:table-cell table:number-columns-repeated="16378"/>
        </table:table-row>
        <table:table-row table:style-name="ro4">
          <table:table-cell/>
          <table:table-cell table:style-name="ce587" office:value-type="currency" office:currency="$" office:value="28.5" calcext:value-type="currency">
            <text:p><text:s/>$28.50 </text:p>
          </table:table-cell>
          <table:table-cell table:style-name="ce597" office:value-type="float" office:value="20396.0870361765" calcext:value-type="float">
            <text:p>20,396</text:p>
          </table:table-cell>
          <table:table-cell table:style-name="ce609" office:value-type="percentage" office:value="1.2090687695074" calcext:value-type="percentage">
            <text:p>120.9%</text:p>
          </table:table-cell>
          <table:table-cell table:style-name="ce597" office:value-type="float" office:value="20419.3972163287" calcext:value-type="float">
            <text:p>20,419</text:p>
          </table:table-cell>
          <table:table-cell table:style-name="ce625" office:value-type="percentage" office:value="1.21148445130144" calcext:value-type="percentage">
            <text:p>121.1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27.5" calcext:value-type="currency">
            <text:p><text:s/>$27.50 </text:p>
          </table:table-cell>
          <table:table-cell table:style-name="ce596" office:value-type="float" office:value="16686.0148668641" calcext:value-type="float">
            <text:p>16,686</text:p>
          </table:table-cell>
          <table:table-cell table:style-name="ce608" office:value-type="percentage" office:value="1.02833767722421" calcext:value-type="percentage">
            <text:p>103 %</text:p>
          </table:table-cell>
          <table:table-cell table:style-name="ce596" office:value-type="float" office:value="16709.3250470163" calcext:value-type="float">
            <text:p>16,709</text:p>
          </table:table-cell>
          <table:table-cell table:style-name="ce624" office:value-type="percentage" office:value="1.03050696377162" calcext:value-type="percentage">
            <text:p>103 %</text:p>
          </table:table-cell>
          <table:table-cell table:number-columns-repeated="16378"/>
        </table:table-row>
        <table:table-row table:style-name="ro7">
          <table:table-cell/>
          <table:table-cell table:style-name="ce588" office:value-type="float" office:value="23.002509356858" calcext:value-type="float">
            <text:p><text:s/>23.00 </text:p>
          </table:table-cell>
          <table:table-cell table:style-name="ce598" office:value-type="float" office:value="0" calcext:value-type="float">
            <text:p>0</text:p>
          </table:table-cell>
          <table:table-cell table:style-name="ce610" office:value-type="percentage" office:value="0.268591836734547" calcext:value-type="percentage">
            <text:p>26.86 %</text:p>
          </table:table-cell>
          <table:table-cell table:style-name="ce598" office:value-type="float" office:value="23.3101801521408" calcext:value-type="float">
            <text:p>23</text:p>
          </table:table-cell>
          <table:table-cell table:style-name="ce626" office:value-type="percentage" office:value="0.269593766157499" calcext:value-type="percentage">
            <text:p>26.96 %</text:p>
          </table:table-cell>
          <table:table-cell table:number-columns-repeated="16378"/>
        </table:table-row>
        <table:table-row table:style-name="ro4">
          <table:table-cell table:number-columns-repeated="7"/>
          <table:table-cell>
            <draw:custom-shape table:end-cell-address="Sensibilidad.S21" table:end-x="0.132cm" table:end-y="0.396cm" draw:z-index="1" draw:name="Rectángulo redondeado 2" draw:style-name="gr2" draw:text-style-name="P3" svg:width="21.06cm" svg:height="5.609cm" svg:x="1.614cm" svg:y="0.423cm">
              <text:p text:style-name="P2"><text:span text:style-name="T1">En el segundo cuadro se detalla acerca de la sensibilidad del valor de mano de obra, donde se puede apreciar que acuerdo al valor que considera en el proyecto es de $ 8.33 dólares. Asimismo, podemos ver que si establecemos un valor de mano de obra de $ 63.30 lo que es posible ya que da representa un VANE = 0 e indica que el valor de este factor es considerado pesimista ya que la empresa tiene la posibilidad de pagar más a la mano de obra, esto debido a que es una empresa de producción y sus colaboradores trabajan a destajo (de acuerdo a la producción). Entonces si el precio de la mano de obra varia, entonces el precio del cojín y lana de ovino se mantiene constante. (ceteris paribus)</text:span></text:p>
              <text:p text:style-name="P2"><text:span text:style-name="T1">También se puede apreciar que, en el análisis de este factor, existe una variación de 659.96%.</text:span></text:p>
              <text:p text:style-name="P2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7">
          <table:table-cell/>
          <table:table-cell table:style-name="ce589" office:value-type="string" calcext:value-type="string" table:number-columns-spanned="5" table:number-rows-spanned="1">
            <text:p><text:span text:style-name="T46">2. </text:span><text:span text:style-name="T47">Sensibilidad de</text:span><text:span text:style-name="T48"> valor de mano de obra</text:span></text:p>
          </table:table-cell>
          <table:covered-table-cell table:number-columns-repeated="4" table:style-name="ce599"/>
          <table:table-cell table:number-columns-repeated="16378"/>
        </table:table-row>
        <table:table-row table:style-name="ro32">
          <table:table-cell/>
          <table:table-cell table:style-name="ce583" office:value-type="string" calcext:value-type="string">
            <text:p>Valor de Mano de Obra</text:p>
          </table:table-cell>
          <table:table-cell table:style-name="ce592" office:value-type="string" calcext:value-type="string">
            <text:p>VANE</text:p>
          </table:table-cell>
          <table:table-cell table:style-name="ce604" office:value-type="string" calcext:value-type="string">
            <text:p>TIRE</text:p>
          </table:table-cell>
          <table:table-cell table:style-name="ce592" office:value-type="string" calcext:value-type="string">
            <text:p>VANF</text:p>
          </table:table-cell>
          <table:table-cell table:style-name="ce620" office:value-type="string" calcext:value-type="string">
            <text:p>TIRF</text:p>
          </table:table-cell>
          <table:table-cell table:number-columns-repeated="16378"/>
        </table:table-row>
        <table:table-row table:style-name="ro4">
          <table:table-cell/>
          <table:table-cell table:style-name="ce590" office:value-type="currency" office:currency="$" office:value="63.3049064314198" calcext:value-type="currency">
            <text:p><text:s/>$63.30 </text:p>
          </table:table-cell>
          <table:table-cell table:style-name="ce600" office:value-type="float" office:value="0" calcext:value-type="float">
            <text:p>0</text:p>
          </table:table-cell>
          <table:table-cell table:style-name="ce611" office:value-type="percentage" office:value="0.268591836734548" calcext:value-type="percentage">
            <text:p>26.86 %</text:p>
          </table:table-cell>
          <table:table-cell table:style-name="ce617" office:value-type="float" office:value="23.3101801521408" calcext:value-type="float">
            <text:p>23</text:p>
          </table:table-cell>
          <table:table-cell table:style-name="ce627" office:value-type="percentage" office:value="0.269593766157498" calcext:value-type="percentage">
            <text:p>26.96 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10" calcext:value-type="currency">
            <text:p><text:s/>$10.00 </text:p>
          </table:table-cell>
          <table:table-cell table:style-name="ce601" office:value-type="float" office:value="19776.5049839014" calcext:value-type="float">
            <text:p>19,777</text:p>
          </table:table-cell>
          <table:table-cell table:style-name="ce608" office:value-type="percentage" office:value="1.1785948078625" calcext:value-type="percentage">
            <text:p>118 %</text:p>
          </table:table-cell>
          <table:table-cell table:style-name="ce596" office:value-type="float" office:value="19799.8151640535" calcext:value-type="float">
            <text:p>19,800</text:p>
          </table:table-cell>
          <table:table-cell table:style-name="ce624" office:value-type="percentage" office:value="1.18097026226251" calcext:value-type="percentage">
            <text:p>118 %</text:p>
          </table:table-cell>
          <table:table-cell table:number-columns-repeated="16378"/>
        </table:table-row>
        <table:table-row table:style-name="ro4">
          <table:table-cell table:style-name="ce581" table:formula="of:=-([.B18]-[.B16])/[.B18]*100" office:value-type="float" office:value="659.962862321967" calcext:value-type="float">
            <text:p>659.96</text:p>
          </table:table-cell>
          <table:table-cell table:style-name="ce587" office:value-type="currency" office:currency="$" office:value="8.33" calcext:value-type="currency">
            <text:p><text:s/>$8.33 </text:p>
          </table:table-cell>
          <table:table-cell table:style-name="ce602" office:value-type="float" office:value="20396.0870361765" calcext:value-type="float">
            <text:p>20,396</text:p>
          </table:table-cell>
          <table:table-cell table:style-name="ce612" office:value-type="percentage" office:value="1.2090687695074" calcext:value-type="percentage">
            <text:p>120.9%</text:p>
          </table:table-cell>
          <table:table-cell table:style-name="ce618" office:value-type="float" office:value="20419.3972163287" calcext:value-type="float">
            <text:p>20,419</text:p>
          </table:table-cell>
          <table:table-cell table:style-name="ce628" office:value-type="percentage" office:value="1.21148445130144" calcext:value-type="percentage">
            <text:p>121.1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7.9" calcext:value-type="currency">
            <text:p><text:s/>$7.90 </text:p>
          </table:table-cell>
          <table:table-cell table:style-name="ce593" office:value-type="float" office:value="20555.620139457" calcext:value-type="float">
            <text:p>20,556</text:p>
          </table:table-cell>
          <table:table-cell table:style-name="ce605" office:value-type="percentage" office:value="1.21693377793283" calcext:value-type="percentage">
            <text:p>121.69 %</text:p>
          </table:table-cell>
          <table:table-cell table:style-name="ce616" office:value-type="float" office:value="20578.9303196091" calcext:value-type="float">
            <text:p>20,578.9</text:p>
          </table:table-cell>
          <table:table-cell table:style-name="ce621" office:value-type="percentage" office:value="1.21935975322653" calcext:value-type="percentage">
            <text:p>121.94 %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7">
          <table:table-cell/>
          <table:table-cell table:style-name="ce589" office:value-type="string" calcext:value-type="string" table:number-columns-spanned="5" table:number-rows-spanned="1">
            <text:p>3. <text:span text:style-name="T49">Sensibilidad de</text:span><text:span text:style-name="T48"> valor de la lana de ovino</text:span></text:p>
          </table:table-cell>
          <table:covered-table-cell table:number-columns-repeated="4" table:style-name="ce599"/>
          <table:table-cell table:number-columns-repeated="16378"/>
        </table:table-row>
        <table:table-row table:style-name="ro15">
          <table:table-cell/>
          <table:table-cell table:style-name="ce583" office:value-type="string" calcext:value-type="string">
            <text:p>Valor de lana de ovino</text:p>
          </table:table-cell>
          <table:table-cell table:style-name="ce592" office:value-type="string" calcext:value-type="string">
            <text:p>VANE</text:p>
          </table:table-cell>
          <table:table-cell table:style-name="ce604" office:value-type="string" calcext:value-type="string">
            <text:p>TIRE</text:p>
          </table:table-cell>
          <table:table-cell table:style-name="ce592" office:value-type="string" calcext:value-type="string">
            <text:p>VANF</text:p>
          </table:table-cell>
          <table:table-cell table:style-name="ce620" office:value-type="string" calcext:value-type="string">
            <text:p>TIRF</text:p>
          </table:table-cell>
          <table:table-cell/>
          <table:table-cell>
            <draw:custom-shape table:end-cell-address="Sensibilidad.S30" table:end-x="0.132cm" table:end-y="0.264cm" draw:z-index="2" draw:name="Rectángulo redondeado 3" draw:style-name="gr2" draw:text-style-name="P3" svg:width="20.769cm" svg:height="3.703cm" svg:x="1.905cm" svg:y="0.874cm">
              <text:p text:style-name="P2"><text:span text:style-name="T1">Y en el tercer cuadro podemos ver el análisis del valor de la lana de ovino, y dentro de los precios de que se consideran dentro del proyecto es de $ 0.13 dólares, lo cual después de realizar el cálculo muestra que existe una posibilidad que de este valor tenga un aumento hasta $ 5.63 dólares, esto debido a que en este valor el VANE se muestra en 0. <text:s/>Asimismo, cabe mencionar que, si es que el precio de la lana de ovino varia, entonces el precio del cojín y el costo de la mano de obra se mantiene constante. (ceteris paribus)</text:span></text:p>
              <text:p text:style-name="P2"><text:span text:style-name="T1">También se muestra que la sensibilidad de este cuadro tiene una variación expresado en 4133.5%, se puede considerar que esto se da porque es una empresa de producción que desarrolla una producción variable.</text:span></text:p>
              <text:p text:style-name="P2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6"/>
        </table:table-row>
        <table:table-row table:style-name="ro4">
          <table:table-cell/>
          <table:table-cell table:style-name="ce591" office:value-type="currency" office:currency="$" office:value="5.63049064314198" calcext:value-type="currency">
            <text:p><text:s/>$5.63 </text:p>
          </table:table-cell>
          <table:table-cell table:style-name="ce600" office:value-type="float" office:value="0" calcext:value-type="float">
            <text:p>0</text:p>
          </table:table-cell>
          <table:table-cell table:style-name="ce613" office:value-type="percentage" office:value="0.268591836734548" calcext:value-type="percentage">
            <text:p>27 %</text:p>
          </table:table-cell>
          <table:table-cell table:style-name="ce617" office:value-type="float" office:value="23.3101801521408" calcext:value-type="float">
            <text:p>23</text:p>
          </table:table-cell>
          <table:table-cell table:style-name="ce629" office:value-type="percentage" office:value="0.269593766157498" calcext:value-type="percentage">
            <text:p>27 %</text:p>
          </table:table-cell>
          <table:table-cell table:number-columns-repeated="16378"/>
        </table:table-row>
        <table:table-row table:style-name="ro4">
          <table:table-cell/>
          <table:table-cell table:style-name="ce90" office:value-type="currency" office:currency="$" office:value="0.2" calcext:value-type="currency">
            <text:p><text:s/>$0.20 </text:p>
          </table:table-cell>
          <table:table-cell table:style-name="ce593" office:value-type="float" office:value="20147.5122008326" calcext:value-type="float">
            <text:p>20,148</text:p>
          </table:table-cell>
          <table:table-cell table:style-name="ce614" office:value-type="percentage" office:value="1.19682897843542" calcext:value-type="percentage">
            <text:p>120 %</text:p>
          </table:table-cell>
          <table:table-cell table:style-name="ce619" office:value-type="float" office:value="20170.8223809848" calcext:value-type="float">
            <text:p>20,171</text:p>
          </table:table-cell>
          <table:table-cell table:style-name="ce630" office:value-type="percentage" office:value="1.19922856859085" calcext:value-type="percentage">
            <text:p>120 %</text:p>
          </table:table-cell>
          <table:table-cell table:number-columns-repeated="16378"/>
        </table:table-row>
        <table:table-row table:style-name="ro4">
          <table:table-cell table:style-name="ce582" table:formula="of:=([.B23]-[.B25])/[.B25]*100" office:value-type="float" office:value="4133.45161138495" calcext:value-type="float">
            <text:p>4133.5</text:p>
          </table:table-cell>
          <table:table-cell table:style-name="ce587" office:value-type="currency" office:currency="$" office:value="0.133" calcext:value-type="currency">
            <text:p><text:s/>$0.13 </text:p>
          </table:table-cell>
          <table:table-cell table:style-name="ce593" office:value-type="float" office:value="20396.0870361765" calcext:value-type="float">
            <text:p>20,396</text:p>
          </table:table-cell>
          <table:table-cell table:style-name="ce615" office:value-type="percentage" office:value="1.2090687695074" calcext:value-type="percentage">
            <text:p>120.9%</text:p>
          </table:table-cell>
          <table:table-cell table:style-name="ce619" office:value-type="float" office:value="20419.3972163287" calcext:value-type="float">
            <text:p>20,419</text:p>
          </table:table-cell>
          <table:table-cell table:style-name="ce631" office:value-type="percentage" office:value="1.21148445130144" calcext:value-type="percentage">
            <text:p>121.1%</text:p>
          </table:table-cell>
          <table:table-cell table:number-columns-repeated="16378"/>
        </table:table-row>
        <table:table-row table:style-name="ro4">
          <table:table-cell/>
          <table:table-cell table:style-name="ce88" office:value-type="currency" office:currency="$" office:value="0.12" calcext:value-type="currency">
            <text:p><text:s/>$0.12 </text:p>
          </table:table-cell>
          <table:table-cell table:style-name="ce601" office:value-type="float" office:value="20444.3179743776" calcext:value-type="float">
            <text:p>20,444</text:p>
          </table:table-cell>
          <table:table-cell table:style-name="ce608" office:value-type="percentage" office:value="1.21144577142743" calcext:value-type="percentage">
            <text:p>121 %</text:p>
          </table:table-cell>
          <table:table-cell table:style-name="ce596" office:value-type="float" office:value="20467.6281545297" calcext:value-type="float">
            <text:p>20,468</text:p>
          </table:table-cell>
          <table:table-cell table:style-name="ce624" office:value-type="percentage" office:value="1.21386456802412" calcext:value-type="percentage">
            <text:p>121 %</text:p>
          </table:table-cell>
          <table:table-cell table:number-columns-repeated="1637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table:style-name="ce603"/>
          <table:table-cell table:number-columns-repeated="16381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961">
          <table:table-cell table:number-columns-repeated="16384"/>
        </table:table-row>
        <table:table-row table:style-name="ro8" table:number-rows-repeated="104758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Escenarios" table:style-name="ta27">
        <table:table-column table:style-name="co61" table:number-columns-repeated="2" table:default-cell-style-name="ce546"/>
        <table:table-column table:style-name="co2" table:default-cell-style-name="ce546"/>
        <table:table-column-group>
          <table:table-column table:style-name="co3" table:number-columns-repeated="3" table:default-cell-style-name="ce546"/>
        </table:table-column-group>
        <table:table-column table:style-name="co61" table:number-columns-repeated="16378" table:default-cell-style-name="ce546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Resumen del escenario</text:p>
          </table:table-cell>
          <table:table-cell table:style-name="ce2"/>
          <table:table-cell table:style-name="ce7" table:number-columns-repeated="3"/>
          <table:table-cell>
            <draw:custom-shape table:end-cell-address="Escenarios.L13" table:end-x="1.64cm" table:end-y="0.449cm" draw:z-index="0" draw:name="Rectángulo redondeado 4" draw:style-name="gr9" draw:text-style-name="P9" svg:width="11.791cm" svg:height="7.36cm" svg:x="-3.774cm" svg:y="0cm">
              <text:p text:style-name="P8"><text:span text:style-name="T1"><text:s/></text:span><text:span text:style-name="T1">Se visualiza que la empresa es rentable, en un escenario pesimista y más aún en un escenario optimista,porque el VANE Y EL TIRE siguen siendo positivos en un gran porcentaje, asi se bajen los precios de los cojines a $27.5 , y se aumenten los costos de mano de obra a $ 10.00 <text:s/>y la lana de ovino a $0.20 , llegamos a obtener un VANE DE $ 15818, y un TIRE de 98.67% asi mismo VANF $15841 y un TIRF de 98.88%, lo cual demuestra que la empresa sigue siendo rentable.</text:span></text:p>
              <text:p text:style-name="P8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7"/>
        </table:table-row>
        <table:table-row table:style-name="ro2">
          <table:table-cell/>
          <table:table-cell table:style-name="ce3" table:number-columns-repeated="2"/>
          <table:table-cell table:style-name="ce8" office:value-type="string" calcext:value-type="string">
            <text:p>Valores probable</text:p>
          </table:table-cell>
          <table:table-cell table:style-name="ce8" office:value-type="string" calcext:value-type="string">
            <text:p>OPTIMISTA</text:p>
          </table:table-cell>
          <table:table-cell table:style-name="ce8" office:value-type="string" calcext:value-type="string">
            <text:p>PESIMISTA</text:p>
          </table:table-cell>
          <table:table-cell table:number-columns-repeated="16378"/>
        </table:table-row>
        <table:table-row-group table:display="false">
          <table:table-row table:style-name="ro3" table:visibility="collapse">
            <table:table-cell/>
            <table:table-cell table:style-name="ce4" table:number-columns-repeated="2"/>
            <table:table-cell table:style-name="ce632"/>
            <table:table-cell table:number-columns-repeated="2" table:style-name="ce639" office:value-type="string" calcext:value-type="string">
              <text:p>Creado por User el 21/02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cambiantes:</text:p>
          </table:table-cell>
          <table:table-cell table:style-name="ce5"/>
          <table:table-cell table:style-name="ce633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4"/>
            <table:table-cell table:style-name="ce4" office:value-type="string" calcext:value-type="string">
              <text:p>Precio del cojín</text:p>
            </table:table-cell>
            <table:table-cell table:style-name="ce634" office:value-type="float" office:value="28.5" calcext:value-type="float">
              <text:p><text:s/>28.50 </text:p>
            </table:table-cell>
            <table:table-cell table:style-name="ce640" office:value-type="float" office:value="29" calcext:value-type="float">
              <text:p><text:s/>29.00 </text:p>
            </table:table-cell>
            <table:table-cell table:style-name="ce640" office:value-type="float" office:value="27.5" calcext:value-type="float">
              <text:p><text:s/>27.50 </text:p>
            </table:table-cell>
            <table:table-cell table:number-columns-repeated="16378"/>
          </table:table-row>
          <table:table-row table:style-name="ro1">
            <table:table-cell/>
            <table:table-cell table:style-name="ce4"/>
            <table:table-cell table:style-name="ce4" office:value-type="string" calcext:value-type="string">
              <text:p>Valor_Mano_Obra</text:p>
            </table:table-cell>
            <table:table-cell table:style-name="ce635" office:value-type="float" office:value="8.33" calcext:value-type="float">
              <text:p>8.33</text:p>
            </table:table-cell>
            <table:table-cell table:style-name="ce641" office:value-type="float" office:value="7.9" calcext:value-type="float">
              <text:p>7.90</text:p>
            </table:table-cell>
            <table:table-cell table:style-name="ce641" office:value-type="float" office:value="10" calcext:value-type="float">
              <text:p>10.00</text:p>
            </table:table-cell>
            <table:table-cell table:number-columns-repeated="16378"/>
          </table:table-row>
          <table:table-row table:style-name="ro1">
            <table:table-cell/>
            <table:table-cell table:style-name="ce4"/>
            <table:table-cell table:style-name="ce4" office:value-type="string" calcext:value-type="string">
              <text:p>Valor_de la lana de ovino</text:p>
            </table:table-cell>
            <table:table-cell table:style-name="ce632" office:value-type="float" office:value="0.133" calcext:value-type="float">
              <text:p>0.133</text:p>
            </table:table-cell>
            <table:table-cell table:style-name="ce642" office:value-type="float" office:value="0.12" calcext:value-type="float">
              <text:p>0.12</text:p>
            </table:table-cell>
            <table:table-cell table:style-name="ce642" office:value-type="float" office:value="0.2" calcext:value-type="float">
              <text:p>0.2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5" office:value-type="string" calcext:value-type="string">
            <text:p>Celdas de resultado:</text:p>
          </table:table-cell>
          <table:table-cell table:style-name="ce5"/>
          <table:table-cell table:style-name="ce633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4"/>
            <table:table-cell table:style-name="ce4" office:value-type="string" calcext:value-type="string">
              <text:p>VANE</text:p>
            </table:table-cell>
            <table:table-cell table:style-name="ce636" office:value-type="float" office:value="20396.0870361765" calcext:value-type="float">
              <text:p>20396</text:p>
            </table:table-cell>
            <table:table-cell table:style-name="ce636" office:value-type="float" office:value="22458.8871623142" calcext:value-type="float">
              <text:p>22459</text:p>
            </table:table-cell>
            <table:table-cell table:style-name="ce636" office:value-type="float" office:value="15817.857979245" calcext:value-type="float">
              <text:p>15818</text:p>
            </table:table-cell>
            <table:table-cell table:number-columns-repeated="16378"/>
          </table:table-row>
          <table:table-row table:style-name="ro1">
            <table:table-cell/>
            <table:table-cell table:style-name="ce4"/>
            <table:table-cell table:style-name="ce4" office:value-type="string" calcext:value-type="string">
              <text:p>TIRE</text:p>
            </table:table-cell>
            <table:table-cell table:style-name="ce637" office:value-type="percentage" office:value="1.2090687695074" calcext:value-type="percentage">
              <text:p>120.91 %</text:p>
            </table:table-cell>
            <table:table-cell table:style-name="ce637" office:value-type="percentage" office:value="1.311334288484" calcext:value-type="percentage">
              <text:p>131.13 %</text:p>
            </table:table-cell>
            <table:table-cell table:style-name="ce637" office:value-type="percentage" office:value="0.986667805889134" calcext:value-type="percentage">
              <text:p>98.67 %</text:p>
            </table:table-cell>
            <table:table-cell table:number-columns-repeated="16378"/>
          </table:table-row>
          <table:table-row table:style-name="ro1">
            <table:table-cell/>
            <table:table-cell table:style-name="ce4"/>
            <table:table-cell table:style-name="ce4" office:value-type="string" calcext:value-type="string">
              <text:p>VANF</text:p>
            </table:table-cell>
            <table:table-cell table:style-name="ce636" office:value-type="float" office:value="20419.3972163287" calcext:value-type="float">
              <text:p>20419</text:p>
            </table:table-cell>
            <table:table-cell table:style-name="ce636" office:value-type="float" office:value="22482.1973424664" calcext:value-type="float">
              <text:p>22482</text:p>
            </table:table-cell>
            <table:table-cell table:style-name="ce636" office:value-type="float" office:value="15841.1681593971" calcext:value-type="float">
              <text:p>15841</text:p>
            </table:table-cell>
            <table:table-cell table:number-columns-repeated="16378"/>
          </table:table-row>
          <table:table-row table:style-name="ro1">
            <table:table-cell/>
            <table:table-cell table:style-name="ce6"/>
            <table:table-cell table:style-name="ce6" office:value-type="string" calcext:value-type="string">
              <text:p>TIRF</text:p>
            </table:table-cell>
            <table:table-cell table:style-name="ce638" office:value-type="percentage" office:value="1.21148445130144" calcext:value-type="percentage">
              <text:p>121.15 %</text:p>
            </table:table-cell>
            <table:table-cell table:style-name="ce638" office:value-type="percentage" office:value="1.31388094802279" calcext:value-type="percentage">
              <text:p>131.39 %</text:p>
            </table:table-cell>
            <table:table-cell table:style-name="ce638" office:value-type="percentage" office:value="0.9887777023339" calcext:value-type="percentage">
              <text:p>98.88 %</text:p>
            </table:table-cell>
            <table:table-cell table:number-columns-repeated="16378"/>
          </table:table-row>
        </table:table-row-group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7" table:style-name="ta28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6" table:style-name="ta29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5" table:style-name="ta30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4" table:style-name="ta3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analisis de sensibilidad" table:style-name="ta3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12" table:style-name="ta3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Hoja9" table:style-name="ta34"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>
            <draw:frame draw:z-index="0" draw:name="Imagen 1" draw:style-name="gr10" draw:text-style-name="P1" svg:width="35.687cm" svg:height="20.317cm" svg:x="0cm" svg:y="0cm">
              <draw:image xlink:href="Pictures/10000000000005560000030036A9C51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</table:table>
      <table:table table:name="Hoja8" table:style-name="ta35">
        <table:table-column table:style-name="co1" table:number-columns-repeated="16384" table:default-cell-style-name="Default"/>
        <table:table-row table:style-name="ro1">
          <table:table-cell>
            <draw:frame draw:z-index="0" draw:name="Imagen 1" draw:style-name="gr10" draw:text-style-name="P1" svg:width="35.687cm" svg:height="20.317cm" svg:x="0cm" svg:y="0cm">
              <draw:image xlink:href="Pictures/10000000000005560000030020136186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</table:table>
      <table:table table:name="Hoja10" table:style-name="ta36">
        <table:table-column table:style-name="co1" table:number-columns-repeated="16384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3"/>
          <table:table-cell>
            <draw:frame draw:z-index="0" draw:name="Imagen 1" draw:style-name="gr10" draw:text-style-name="P1" svg:width="35.686cm" svg:height="20.317cm" svg:x="0cm" svg:y="0cm">
              <draw:image xlink:href="Pictures/1000000000000556000003008882B6AC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</table:table>
      <table:table table:name="Hoja3" table:style-name="ta37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'file:///C:/Users/User/Downloads/MERMELADA%20DE%20ROCOTO%20III.xlsx'#Resumen" table:print="false" table:style-name="ta_extref">
        <table:table-source xlink:type="simple" xlink:href="/C:/Users/User/Downloads/MERMELADA%20DE%20ROCOTO%20III.xlsx" table:table-name="Resumen" table:mode="copy-results-only"/>
        <table:table-column table:number-columns-repeated="8"/>
        <table:table-row table:number-rows-repeated="10">
          <table:table-cell table:number-columns-repeated="8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</table:table>
      <table:table table:name="'file:///TESIS%20DOCTORADO%20UNFV%202021/PROYECTOS%20APLICATIVOS%20POSGRADO/COJINES%20BORDADOS/COJINES%20BORDADOS%20tesis.xlsx'#Resumen" table:print="false" table:style-name="ta_extref">
        <table:table-source xlink:type="simple" xlink:href="/TESIS%20DOCTORADO%20UNFV%202021/PROYECTOS%20APLICATIVOS%20POSGRADO/COJINES%20BORDADOS/COJINES%20BORDADOS%20tesis.xlsx" table:table-name="Resumen" table:mode="copy-results-only"/>
        <table:table-column table:number-columns-repeated="5"/>
        <table:table-row table:number-rows-repeated="12">
          <table:table-cell table:number-columns-repeated="5"/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  <table:table-cell/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  <table:table-cell/>
          <table:table-cell table:style-name="ce1" office:value-type="float" office:value="NaN">
            <text:p>NaN</text:p>
          </table:table-cell>
        </table:table-row>
      </table:table>
      <table:table table:name="'file:///TESIS%20DOCTORADO%20UNFV%202021/PROYECTOS%20APLICATIVOS%20POSGRADO/COJINES%20BORDADOS/COJINES%20BORDADOS%20tesis.xlsx'#Ku" table:print="false" table:style-name="ta_extref">
        <table:table-source xlink:type="simple" xlink:href="/TESIS%20DOCTORADO%20UNFV%202021/PROYECTOS%20APLICATIVOS%20POSGRADO/COJINES%20BORDADOS/COJINES%20BORDADOS%20tesis.xlsx" table:table-name="Ku" table:mode="copy-results-only"/>
        <table:table-column table:number-columns-repeated="3"/>
        <table:table-row table:number-rows-repeated="11">
          <table:table-cell table:number-columns-repeated="3"/>
        </table:table-row>
        <table:table-row>
          <table:table-cell table:number-columns-repeated="2"/>
          <table:table-cell table:style-name="ce1" office:value-type="float" office:value="0.24322">
            <text:p>0.24322</text:p>
          </table:table-cell>
        </table:table-row>
      </table:table>
      <table:named-expressions>
        <table:named-range table:name="A" table:base-cell-address="$Hoja1.$A$1" table:cell-range-address="$'TABLA AMORTIZACIÓN'.$D$12"/>
        <table:named-expression table:name="Codigos" table:base-cell-address="$Hoja1.$A$1" table:expression="[1]!Productos[CÓDIGO]"/>
        <table:named-expression table:name="Comprobantes" table:base-cell-address="$Hoja1.$A$1" table:expression="['file:///C:/Users/santiago/Downloads/planilla-de-excel-para-el-aplicativo-de-compras-y-ventas.xlsx'#$'Tabla de Comprobantes'.$A$3:.$A$65]"/>
        <table:named-range table:name="Mano_de_obra_tejedoras" table:base-cell-address="$Hoja1.$A$1" table:cell-range-address="$DATOS.$H$18"/>
        <table:named-range table:name="N" table:base-cell-address="$Hoja1.$A$1" table:cell-range-address="$'TABLA AMORTIZACIÓN'.$D$9"/>
        <table:named-expression table:name="PC" table:base-cell-address="$Hoja1.$A$1" table:expression="['file:///C:/Users/santiago/Downloads/planilla-de-excel-para-el-aplicativo-de-compras-y-ventas.xlsx'#$'Tabla de Comprobantes'.$E$3:.$E$14]"/>
        <table:named-range table:name="Precio_de_la_Lana" table:base-cell-address="$Hoja1.$A$1" table:cell-range-address="$DATOS.$H$17"/>
        <table:named-expression table:name="Precio_Materia_Prima" table:base-cell-address="$Hoja1.$A$1" table:expression="#REF!"/>
        <table:named-expression table:name="Precio_Queso_Maduro" table:base-cell-address="$Hoja1.$A$1" table:expression="#REF!"/>
        <table:named-expression table:name="Precio_retablo_unidad" table:base-cell-address="$Hoja1.$A$1" table:expression="#REF!"/>
        <table:named-expression table:name="Tipo" table:base-cell-address="$Hoja1.$A$1" table:expression="['file:///C:/Users/LENOVO/Downloads/planilla-de-excel-para-control-de-stocks.xlsx'#$Auxiliar.$A$3:.$A$5]"/>
        <table:named-expression table:name="TIRE" table:base-cell-address="$Hoja1.$A$1" table:expression="#REF!"/>
        <table:named-expression table:name="TIRF" table:base-cell-address="$Hoja1.$A$1" table:expression="#REF!"/>
        <table:named-range table:name="Valor_del_cojin" table:base-cell-address="$Hoja1.$A$1" table:cell-range-address="$DATOS.$H$16"/>
        <table:named-range table:name="Valor_Mano_Obra" table:base-cell-address="$Hoja1.$A$1" table:cell-range-address="$DATOS.$H$15"/>
        <table:named-expression table:name="VANE" table:base-cell-address="$Hoja1.$A$1" table:expression="#REF!"/>
        <table:named-expression table:name="VANF" table:base-cell-address="$Hoja1.$A$1" table:expression="#REF!"/>
        <table:named-range table:name="VP" table:base-cell-address="$Hoja1.$A$1" table:cell-range-address="$'TABLA AMORTIZACIÓN'.$D$7"/>
        <table:named-expression table:name="_Fill" table:base-cell-address="$Hoja1.$A$1" table:expression="#REF!"/>
      </table:named-expressions>
      <table:database-ranges>
        <table:database-range table:name="Tabla1" table:target-range-address="'TABLA AMORTIZACIÓN'.B15:'TABLA AMORTIZACIÓN'.G2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1" svg:font-family="Calibri"/>
    <style:font-face style:name="Courier" svg:font-family="Courier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3P0" style:volatile="true">
      <number:text loext:blank-width-char=" "> $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3P1" style:volatile="true">
      <number:text loext:blank-width-char=" "> $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3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" number:min-decimal-places="1" number:min-integer-digits="1" number:grouping="true"/>
    </number:number-style>
    <number:number-style style:name="N137">
      <number:number number:decimal-places="3" number:min-decimal-places="3" number:min-integer-digits="1"/>
    </number:number-style>
    <number:percentage-style style:name="N138">
      <number:number number:decimal-places="2" number:min-decimal-places="2" number:min-integer-digits="1"/>
      <number:text> %</number:text>
    </number:percentage-style>
    <number:number-style style:name="N139">
      <number:text>$ </number:text>
      <number:number number:decimal-places="0" number:min-decimal-places="0" number:min-integer-digits="1" number:grouping="true"/>
    </number:number-style>
    <number:percentage-style style:name="N140">
      <number:text>TIR = </number:text>
      <number:number number:decimal-places="3" number:min-decimal-places="3" number:min-integer-digits="1"/>
      <number:text>%</number:text>
    </number:percentage-style>
    <number:percentage-style style:name="N141">
      <number:number number:decimal-places="3" number:min-decimal-places="3" number:min-integer-digits="1"/>
      <number:text>%</number:text>
    </number:percentage-style>
    <number:number-style style:name="N142">
      <number:text>$ </number:text>
      <number:number number:decimal-places="2" number:min-decimal-places="2" number:min-integer-digits="1" number:grouping="true"/>
    </number:number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-"> </number:text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45P1" style:volatile="true">
      <number:text loext:blank-width-char="-"> </number:text>
      <number:currency-symbol number:language="es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5P2" style:volatile="true">
      <number:text loext:blank-width-char="-"> </number:text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45">
      <number:text loext:blank-width-char="-"> </number:text>
      <number:text-content/>
      <number:text loext:blank-width-char=" 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text>S/. </number:text>
      <number:number number:decimal-places="2" number:min-decimal-places="2" number:min-integer-digits="1" number:grouping="true"/>
    </number:number-style>
    <number:number-style style:name="N14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9P0"/>
    </number:number-style>
    <number:number-style style:name="N15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33"/>
    <style:style style:name="Moneda_20_2" style:display-name="Moneda 2" style:family="table-cell" style:parent-style-name="Default" style:data-style-name="N143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style:style style:name="ConditionalStyle_5f_15" style:display-name="ConditionalStyle_15" style:family="table-cell" style:parent-style-name="Default">
      <style:table-cell-properties fo:background-color="#dce4e0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6" style:display-name="ConditionalStyle_16" style:family="table-cell" style:parent-style-name="Default">
      <style:table-cell-properties fo:background-color="#00ffff" fo:border="0.74pt solid #000000"/>
    </style:style>
    <style:style style:name="ConditionalStyle_5f_17" style:display-name="ConditionalStyle_17" style:family="table-cell" style:parent-style-name="Default">
      <style:table-cell-properties fo:background-color="#00ffff" fo:border="0.74pt solid #00000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" style:display-name="ConditionalStyle_1" style:family="table-cell" style:parent-style-name="Default">
      <style:table-cell-properties fo:border="0.74pt solid #000000"/>
    </style:style>
    <style:style style:name="ConditionalStyle_5f_2" style:display-name="ConditionalStyle_2" style:family="table-cell" style:parent-style-name="Default">
      <style:table-cell-properties fo:background-color="#f2f2f2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onditionalStyle_5f_3" style:display-name="ConditionalStyle_3" style:family="table-cell" style:parent-style-name="Default">
      <style:table-cell-properties fo:background-color="transparent" fo:border="0.74pt solid #a6a6a6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</style:style>
    <style:style style:name="ConditionalStyle_5f_4" style:display-name="ConditionalStyle_4" style:family="table-cell" style:parent-style-name="Default">
      <style:table-cell-properties fo:border="0.74pt solid #000000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" style:display-name="PageStyle_Resumen del escena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" style:display-name="PageStyle_DA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3" style:display-name="PageStyle_Resumen del escenario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men_20_tributario_20_y_20_laboral" style:display-name="PageStyle_Regimen tributario y labor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29__20_Costos_5f_producción" style:display-name="PageStyle_d) Costos_produc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_29__20_Dep._20_y_20_VR" style:display-name="PageStyle_c) Dep. y V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_29__20_Inversión_20_Inicial" style:display-name="PageStyle_b) Inversión 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29__20_Planilla" style:display-name="PageStyle_e) Planill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_29__20_Estado_20_de_20_Resultados" style:display-name="PageStyle_i) Estado de 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_29__20_Costos_5f_Unitarios" style:display-name="PageStyle_g) Costos_Unitari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_29__20_Gastos_5f_Operativos" style:display-name="PageStyle_f) Gastos_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29__20_Presupuesto_5f_Ventas" style:display-name="PageStyle_a) Presupuesto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_29__20_Capital_5f_Trabajo" style:display-name="PageStyle_h) Capital_Trabaj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AMORTIZACIÓN" style:display-name="PageStyle_TABLA AMORTIZ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_20_DE_20_PAGOS" style:display-name="PageStyle_PLAN DE PAG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ortización_20_de_20_Préstamos" style:display-name="PageStyle_Amortización de Préstam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tas" style:display-name="PageStyle_be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._29__20_Ku" style:display-name="PageStyle_l.) K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_29__20_Flujos_20_de_20_Caja" style:display-name="PageStyle_k) Flujos de Ca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_29__20_cronograma_20_deuda" style:display-name="PageStyle_j) cronograma 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cenarios" style:display-name="PageStyle_Escen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7" style:display-name="PageStyle_Hoja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_29__20_Ke_20_y_20_Kwacc" style:display-name="PageStyle_m) Ke y Kwac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20_de_20_sensibilidad" style:display-name="PageStyle_analisis de 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2" style:display-name="PageStyle_Hoja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0" style:display-name="PageStyle_Hoja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8" style:display-name="PageStyle_Hoja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9" style:display-name="PageStyle_Hoja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Usuario</dc:creator>
    <meta:print-date>2021-06-26T03:51:46</meta:print-date>
    <meta:creation-date>2021-02-06T22:01:03</meta:creation-date>
    <dc:date>2021-07-02T13:22:54</dc:date>
    <meta:generator>LibreOffice/24.2.4.2$Linux_X86_64 LibreOffice_project/420$Build-2</meta:generator>
    <meta:document-statistic meta:table-count="38" meta:cell-count="6884" meta:object-count="12"/>
    <meta:user-defined meta:name="AppVersion">16.0300</meta:user-defined>
  </office:meta>
</office:document-meta>
</file>