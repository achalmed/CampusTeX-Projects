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4600000392B0635E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7.02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2.656cm"/>
    </style:style>
    <style:style style:name="co13" style:family="table-column">
      <style:table-column-properties fo:break-before="auto" style:column-width="2.574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4.531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8.027cm"/>
    </style:style>
    <style:style style:name="co22" style:family="table-column">
      <style:table-column-properties fo:break-before="auto" style:column-width="1.203cm"/>
    </style:style>
    <style:style style:name="co23" style:family="table-column">
      <style:table-column-properties fo:break-before="auto" style:column-width="6.098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1.93cm"/>
    </style:style>
    <style:style style:name="co26" style:family="table-column">
      <style:table-column-properties fo:break-before="auto" style:column-width="2.432cm"/>
    </style:style>
    <style:style style:name="co27" style:family="table-column">
      <style:table-column-properties fo:break-before="auto" style:column-width="2.321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1.79cm"/>
    </style:style>
    <style:style style:name="co30" style:family="table-column">
      <style:table-column-properties fo:break-before="auto" style:column-width="2.489cm"/>
    </style:style>
    <style:style style:name="co31" style:family="table-column">
      <style:table-column-properties fo:break-before="auto" style:column-width="7.105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1.734cm"/>
    </style:style>
    <style:style style:name="co35" style:family="table-column">
      <style:table-column-properties fo:break-before="auto" style:column-width="2.182cm"/>
    </style:style>
    <style:style style:name="co36" style:family="table-column">
      <style:table-column-properties fo:break-before="auto" style:column-width="3.076cm"/>
    </style:style>
    <style:style style:name="co37" style:family="table-column">
      <style:table-column-properties fo:break-before="auto" style:column-width="1.595cm"/>
    </style:style>
    <style:style style:name="co38" style:family="table-column">
      <style:table-column-properties fo:break-before="auto" style:column-width="1.035cm"/>
    </style:style>
    <style:style style:name="co39" style:family="table-column">
      <style:table-column-properties fo:break-before="auto" style:column-width="4.503cm"/>
    </style:style>
    <style:style style:name="co40" style:family="table-column">
      <style:table-column-properties fo:break-before="auto" style:column-width="5.426cm"/>
    </style:style>
    <style:style style:name="co41" style:family="table-column">
      <style:table-column-properties fo:break-before="auto" style:column-width="4.223cm"/>
    </style:style>
    <style:style style:name="co42" style:family="table-column">
      <style:table-column-properties fo:break-before="auto" style:column-width="5.593cm"/>
    </style:style>
    <style:style style:name="co43" style:family="table-column">
      <style:table-column-properties fo:break-before="auto" style:column-width="0.979cm"/>
    </style:style>
    <style:style style:name="co44" style:family="table-column">
      <style:table-column-properties fo:break-before="auto" style:column-width="2.378cm"/>
    </style:style>
    <style:style style:name="co45" style:family="table-column">
      <style:table-column-properties fo:break-before="auto" style:column-width="1.873cm"/>
    </style:style>
    <style:style style:name="co46" style:family="table-column">
      <style:table-column-properties fo:break-before="auto" style:column-width="3.524cm"/>
    </style:style>
    <style:style style:name="co47" style:family="table-column">
      <style:table-column-properties fo:break-before="auto" style:column-width="2.628cm"/>
    </style:style>
    <style:style style:name="co48" style:family="table-column">
      <style:table-column-properties fo:break-before="auto" style:column-width="2.041cm"/>
    </style:style>
    <style:style style:name="co49" style:family="table-column">
      <style:table-column-properties fo:break-before="auto" style:column-width="4.475cm"/>
    </style:style>
    <style:style style:name="co50" style:family="table-column">
      <style:table-column-properties fo:break-before="auto" style:column-width="6.013cm"/>
    </style:style>
    <style:style style:name="co51" style:family="table-column">
      <style:table-column-properties fo:break-before="auto" style:column-width="2.713cm"/>
    </style:style>
    <style:style style:name="co52" style:family="table-column">
      <style:table-column-properties fo:break-before="auto" style:column-width="2.685cm"/>
    </style:style>
    <style:style style:name="co53" style:family="table-column">
      <style:table-column-properties fo:break-before="auto" style:column-width="0.616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2.406cm"/>
    </style:style>
    <style:style style:name="co56" style:family="table-column">
      <style:table-column-properties fo:break-before="auto" style:column-width="2.824cm"/>
    </style:style>
    <style:style style:name="co57" style:family="table-column">
      <style:table-column-properties fo:break-before="auto" style:column-width="6.322cm"/>
    </style:style>
    <style:style style:name="co58" style:family="table-column">
      <style:table-column-properties fo:break-before="auto" style:column-width="1.958cm"/>
    </style:style>
    <style:style style:name="co59" style:family="table-column">
      <style:table-column-properties fo:break-before="auto" style:column-width="0.699cm"/>
    </style:style>
    <style:style style:name="co60" style:family="table-column">
      <style:table-column-properties fo:break-before="auto" style:column-width="0.644cm"/>
    </style:style>
    <style:style style:name="co61" style:family="table-column">
      <style:table-column-properties fo:break-before="auto" style:column-width="4.307cm"/>
    </style:style>
    <style:style style:name="co62" style:family="table-column">
      <style:table-column-properties fo:break-before="auto" style:column-width="4.083cm"/>
    </style:style>
    <style:style style:name="co63" style:family="table-column">
      <style:table-column-properties fo:break-before="auto" style:column-width="2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185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ro14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0.552cm" fo:break-before="auto" style:use-optimal-row-height="tru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736cm" fo:break-before="auto" style:use-optimal-row-height="true"/>
    </style:style>
    <style:style style:name="ro19" style:family="table-row">
      <style:table-row-properties style:row-height="0.778cm" fo:break-before="auto" style:use-optimal-row-height="true"/>
    </style:style>
    <style:style style:name="ta1" style:family="table" style:master-page-name="PageStyle_5f_Resumen_20_del_20_escenario_20_2">
      <style:table-properties table:display="true" style:writing-mode="lr-tb"/>
    </style:style>
    <style:style style:name="ta2" style:family="table" style:master-page-name="PageStyle_5f_Análisis_20_de_20_sensibilidad">
      <style:table-properties table:display="true" style:writing-mode="lr-tb"/>
    </style:style>
    <style:style style:name="ta3" style:family="table" style:master-page-name="PageStyle_5f_Análisis_20_de_20_sensibilidad">
      <style:table-properties table:display="false" style:writing-mode="lr-tb"/>
    </style:style>
    <style:style style:name="ta4" style:family="table" style:master-page-name="PageStyle_5f_Resumen">
      <style:table-properties table:display="true" style:writing-mode="lr-tb"/>
    </style:style>
    <style:style style:name="ta5" style:family="table" style:master-page-name="PageStyle_5f_Presupuesto_20_de_20_ventas">
      <style:table-properties table:display="true" style:writing-mode="lr-tb"/>
    </style:style>
    <style:style style:name="ta6" style:family="table" style:master-page-name="PageStyle_5f_Inversión_20_inicial">
      <style:table-properties table:display="true" style:writing-mode="lr-tb"/>
    </style:style>
    <style:style style:name="ta7" style:family="table" style:master-page-name="PageStyle_5f_Depreciación">
      <style:table-properties table:display="true" style:writing-mode="lr-tb"/>
    </style:style>
    <style:style style:name="ta8" style:family="table" style:master-page-name="PageStyle_5f_Costo_20_de_20_producción">
      <style:table-properties table:display="true" style:writing-mode="lr-tb"/>
    </style:style>
    <style:style style:name="ta9" style:family="table" style:master-page-name="PageStyle_5f_Sueldos">
      <style:table-properties table:display="true" style:writing-mode="lr-tb"/>
    </style:style>
    <style:style style:name="ta10" style:family="table" style:master-page-name="PageStyle_5f_Gastos_20_operativos">
      <style:table-properties table:display="true" style:writing-mode="lr-tb"/>
    </style:style>
    <style:style style:name="ta11" style:family="table" style:master-page-name="PageStyle_5f_Capital_5f_Trabajo">
      <style:table-properties table:display="true" style:writing-mode="lr-tb"/>
    </style:style>
    <style:style style:name="ta12" style:family="table" style:master-page-name="PageStyle_5f_Costo_20_unitario">
      <style:table-properties table:display="true" style:writing-mode="lr-tb"/>
    </style:style>
    <style:style style:name="ta13" style:family="table" style:master-page-name="PageStyle_5f_Punto_20_de_20_equilibrio">
      <style:table-properties table:display="true" style:writing-mode="lr-tb"/>
    </style:style>
    <style:style style:name="ta14" style:family="table" style:master-page-name="PageStyle_5f_Estado_20_de_20_resultados">
      <style:table-properties table:display="true" style:writing-mode="lr-tb"/>
    </style:style>
    <style:style style:name="ta15" style:family="table" style:master-page-name="PageStyle_5f_Costo_5f_Deuda">
      <style:table-properties table:display="true" style:writing-mode="lr-tb"/>
    </style:style>
    <style:style style:name="ta16" style:family="table" style:master-page-name="PageStyle_5f_COK_3d_Ku">
      <style:table-properties table:display="true" style:writing-mode="lr-tb"/>
    </style:style>
    <style:style style:name="ta17" style:family="table" style:master-page-name="PageStyle_5f_Kert_20_y_20_Wacc">
      <style:table-properties table:display="true" style:writing-mode="lr-tb"/>
    </style:style>
    <style:style style:name="ta18" style:family="table" style:master-page-name="PageStyle_5f_FLUJO_20_DE_20_CAJA">
      <style:table-properties table:display="true" style:writing-mode="lr-tb"/>
    </style:style>
    <style:style style:name="ta19" style:family="table" style:master-page-name="PageStyle_5f_Renta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36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36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Percent" style:data-style-name="N1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0">
      <style:table-cell-properties fo:border-bottom="0.74pt solid #000000" fo:background-color="#8faadc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0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43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36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6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47" style:family="table-cell" style:parent-style-name="Default" style:data-style-name="N1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36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1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1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1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Percent" style:data-style-name="N14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Percent" style:data-style-name="N14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Percent" style:data-style-name="N11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Percent" style:data-style-name="N1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44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61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Percent" style:data-style-name="N14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cell-protect="protected" style:print-content="true"/>
    </style:style>
    <style:style style:name="ce75" style:family="table-cell" style:parent-style-name="Default" style:data-style-name="N10">
      <style:table-cell-properties fo:border-bottom="0.74pt solid #000000" fo:background-color="#8faadc" style:cell-protect="protected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0">
      <style:table-cell-properties fo:background-color="#8faadc" style:cell-protect="protected" style:print-content="true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Percent" style:data-style-name="N14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>
      <style:table-cell-properties fo:background-color="#f4b183" style:diagonal-bl-tr="none" style:diagonal-tl-br="none" fo:border="0.74pt solid #000000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3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diagonal-bl-tr="none" style:diagonal-tl-br="none" fo:border="0.74pt solid #000000" style:rotation-align="none"/>
    </style:style>
    <style:style style:name="ce95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 style:data-style-name="N3">
      <style:table-cell-properties fo:border-bottom="0.74pt solid #000000" fo:background-color="#fbe5d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3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10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10">
      <style:table-cell-properties style:rotation-align="none"/>
    </style:style>
    <style:style style:name="ce10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3">
      <style:table-cell-properties fo:border-bottom="0.74pt solid #000000" fo:background-color="#fbe5d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1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1c62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c7e4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8faa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1c629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3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8faa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8faa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8faa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8faa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3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2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 style:data-style-name="N2">
      <style:table-cell-properties fo:background-color="#8faa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9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2">
      <style:table-cell-properties fo:border-bottom="1.76pt solid #000000" fo:background-color="#c5e0b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2" style:family="table-cell" style:parent-style-name="Default">
      <style:table-cell-properties fo:border-bottom="1.76pt solid #000000" fo:background-color="#c5e0b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Excel_20_Built-in_20_Percent" style:data-style-name="N1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5" style:family="table-cell" style:parent-style-name="Default" style:data-style-name="N1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67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1.76pt solid #000000" style:rotation-align="none"/>
    </style:style>
    <style:style style:name="ce17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5482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135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141">
      <style:table-cell-properties fo:background-color="#ffffff" style:diagonal-bl-tr="none" style:diagonal-tl-br="none" fo:border="none" style:rotation-align="none"/>
    </style:style>
    <style:style style:name="ce189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2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 style:data-style-name="N141">
      <style:table-cell-properties fo:background-color="#ffffff" style:rotation-align="none"/>
    </style:style>
    <style:style style:name="ce202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04" style:family="table-cell" style:parent-style-name="Default">
      <style:table-cell-properties fo:background-color="#ffffff" style:rotation-align="none"/>
    </style:style>
    <style:style style:name="ce20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order-bottom="0.74pt solid #000000" fo:background-color="#b4c7e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136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 style:data-style-name="N2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2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 style:data-style-name="N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4">
      <style:table-cell-properties fo:background-color="#ffffff" style:rotation-align="none">
        <loext:background-complex-color loext:theme-type="light1" loext:color-type="theme"/>
      </style:table-cell-properties>
    </style:style>
    <style:style style:name="ce223" style:family="table-cell" style:parent-style-name="Default" style:data-style-name="N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6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27" style:family="table-cell" style:parent-style-name="Default" style:data-style-name="N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 style:data-style-name="N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4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44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3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 style:data-style-name="N3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 style:data-style-name="N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7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 style:data-style-name="N2">
      <style:table-cell-properties fo:border-bottom="1.76pt solid #000000" fo:background-color="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Excel_20_Built-in_20_Comma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 style:data-style-name="N3">
      <style:table-cell-properties fo:background-color="#ffffff" style:rotation-align="none"/>
    </style:style>
    <style:style style:name="ce28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3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138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13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3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306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30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309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310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311" style:family="table-cell" style:parent-style-name="Default" style:data-style-name="N137">
      <style:table-cell-properties fo:background-color="#ffffff" style:rotation-align="none"/>
    </style:style>
    <style:style style:name="ce3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32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32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4">
      <style:table-cell-properties style:rotation-align="none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4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33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36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4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47" style:family="table-cell" style:parent-style-name="Default" style:data-style-name="N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35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4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4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4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2">
      <style:table-cell-properties style:rotation-align="none"/>
    </style:style>
    <style:style style:name="ce36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9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81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82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83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 style:data-style-name="N3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387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388" style:family="table-cell" style:parent-style-name="Default" style:data-style-name="N4">
      <style:table-cell-properties fo:border-bottom="0.74pt solid #000000" fo:background-color="#a9d18e" style:diagonal-bl-tr="none" style:diagonal-tl-br="none" fo:border-left="0.74pt solid #000000" fo:border-right="1.76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394" style:family="table-cell" style:parent-style-name="Default">
      <style:table-cell-properties fo:background-color="#c9c9c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40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12" style:family="table-cell" style:parent-style-name="Default">
      <style:table-cell-properties fo:border-bottom="1.76pt solid #000000" fo:background-color="#c0c0c0" style:diagonal-bl-tr="none" style:diagonal-tl-br="none" fo:border-left="1.76pt solid #000000" fo:border-right="none" style:rotation-align="none" fo:border-top="1.76pt solid #000000"/>
    </style:style>
    <style:style style:name="ce413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14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15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4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2" style:family="table-cell" style:parent-style-name="Default" style:data-style-name="N2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23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424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25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42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427" style:family="table-cell" style:parent-style-name="Excel_20_Built-in_20_Percen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Excel_20_Built-in_20_Percent" style:data-style-name="N14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Percent" style:data-style-name="N14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Default" style:data-style-name="N14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34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13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7" style:family="table-cell" style:parent-style-name="Default" style:data-style-name="N141">
      <style:table-cell-properties style:diagonal-bl-tr="none" style:diagonal-tl-br="none" fo:border="0.74pt solid #000000" style:rotation-align="none"/>
    </style:style>
    <style:style style:name="ce438" style:family="table-cell" style:parent-style-name="Default" style:data-style-name="N14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39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0" style:family="table-cell" style:parent-style-name="Excel_20_Built-in_20_Percent" style:data-style-name="N14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Percent" style:data-style-name="N14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Excel_20_Built-in_20_Percent" style:data-style-name="N14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1">
      <style:table-cell-properties style:rotation-align="none"/>
    </style:style>
    <style:style style:name="ce445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5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4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 style:data-style-name="N141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457" style:family="table-cell" style:parent-style-name="Default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 style:data-style-name="N14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59" style:family="table-cell" style:parent-style-name="Default" style:data-style-name="N14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 style:data-style-name="N14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468" style:family="table-cell" style:parent-style-name="Default" style:data-style-name="N1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</style:style>
    <style:style style:name="ce472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 style:data-style-name="N13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6" style:family="table-cell" style:parent-style-name="Default" style:data-style-name="N13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7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80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48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Percent" style:data-style-name="N11">
      <style:table-cell-properties fo:background-color="#54823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133">
      <style:table-cell-properties style:rotation-align="none"/>
    </style:style>
    <style:style style:name="ce499" style:family="table-cell" style:parent-style-name="Default" style:data-style-name="N11">
      <style:table-cell-properties style:rotation-align="none"/>
    </style:style>
    <style:style style:name="ce500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2" style:family="table-cell" style:parent-style-name="Default">
      <style:table-cell-properties fo:background-color="#f4b183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0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6" style:family="table-cell" style:parent-style-name="Default">
      <style:table-cell-properties fo:background-color="#dbdb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8" style:family="table-cell" style:parent-style-name="Default">
      <style:table-cell-properties fo:border-bottom="1.76pt solid #000000" fo:background-color="#db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1.76pt solid #000000" fo:background-color="#db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6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8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9" style:family="table-cell" style:parent-style-name="Default" style:data-style-name="N14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3" style:family="table-cell" style:parent-style-name="Default" style:data-style-name="N141">
      <style:table-cell-properties style:rotation-align="none"/>
    </style:style>
    <style:style style:name="ce52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>
      <style:table-cell-properties fo:border-bottom="1.76pt solid #000000" fo:background-color="#b4c7e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1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33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34" style:family="table-cell" style:parent-style-name="Excel_20_Built-in_20_Comma" style:data-style-name="N143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36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7" style:family="table-cell" style:parent-style-name="Excel_20_Built-in_20_Percent" style:data-style-name="N14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39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0" style:family="table-cell" style:parent-style-name="Default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</style:style>
    <style:style style:name="ce54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Comma" style:data-style-name="N143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style:font-name="Calibri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9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1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1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5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6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2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2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22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2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9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30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31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32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33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34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5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36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37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38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 del escenario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-group>
          <table:table-column table:style-name="co3" table:number-columns-repeated="4" table:default-cell-style-name="Default"/>
        </table:table-column-group>
        <table:table-column table:style-name="co1" table:number-columns-repeated="16377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sumen del escenario</text:p>
          </table:table-cell>
          <table:table-cell table:style-name="ce1"/>
          <table:table-cell table:style-name="ce6" table:number-columns-repeated="4"/>
          <table:table-cell table:number-columns-repeated="16377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Valores actuales:</text:p>
          </table:table-cell>
          <table:table-cell table:style-name="ce7" office:value-type="string" calcext:value-type="string">
            <text:p>Probable</text:p>
          </table:table-cell>
          <table:table-cell table:style-name="ce7" office:value-type="string" calcext:value-type="string">
            <text:p>Pesimista</text:p>
          </table:table-cell>
          <table:table-cell table:style-name="ce7" office:value-type="string" calcext:value-type="string">
            <text:p>Optimista</text:p>
          </table:table-cell>
          <table:table-cell table:number-columns-repeated="16377"/>
        </table:table-row>
        <table:table-row-group>
          <table:table-row table:style-name="ro2" table:visibility="collapse">
            <table:table-cell table:number-columns-repeated="3"/>
            <table:table-cell table:style-name="ce8"/>
            <table:table-cell table:style-name="ce14" office:value-type="string" calcext:value-type="string">
              <text:p>Creado por ASUS el 01/03/2021</text:p>
            </table:table-cell>
            <table:table-cell table:style-name="ce14" office:value-type="string" calcext:value-type="string">
              <text:p>Creado por ASUS el 01/03/2021</text:p>
              <text:p>Modificado por ASUS el 01/03/2021</text:p>
            </table:table-cell>
            <table:table-cell table:style-name="ce14" office:value-type="string" calcext:value-type="string">
              <text:p>Creado por ASUS el 01/03/2021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ce4" office:value-type="string" calcext:value-type="string">
            <text:p>Celdas cambiantes:</text:p>
          </table:table-cell>
          <table:table-cell table:style-name="ce4"/>
          <table:table-cell table:style-name="ce9" table:number-columns-repeated="4"/>
          <table:table-cell table:number-columns-repeated="16377"/>
        </table:table-row>
        <table:table-row-group>
          <table:table-row table:style-name="ro1">
            <table:table-cell/>
            <table:table-cell office:value-type="string" calcext:value-type="string">
              <text:p>Valor de venta A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1.4154" calcext:value-type="percentage">
              <text:p>142 %</text:p>
            </table:table-cell>
            <table:table-cell table:style-name="ce15" office:value-type="percentage" office:value="-0.3" calcext:value-type="percentage">
              <text:p>-30 %</text:p>
            </table:table-cell>
            <table:table-cell table:style-name="ce15" office:value-type="percentage" office:value="0.22" calcext:value-type="percentage">
              <text:p>22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lor de venta B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1.1113" calcext:value-type="percentage">
              <text:p>111 %</text:p>
            </table:table-cell>
            <table:table-cell table:style-name="ce15" office:value-type="percentage" office:value="-0.4" calcext:value-type="percentage">
              <text:p>-40 %</text:p>
            </table:table-cell>
            <table:table-cell table:style-name="ce15" office:value-type="percentage" office:value="0.21" calcext:value-type="percentage">
              <text:p>21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lor hilado de alpaca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0.078" calcext:value-type="percentage">
              <text:p>8 %</text:p>
            </table:table-cell>
            <table:table-cell table:style-name="ce15" office:value-type="percentage" office:value="0.25" calcext:value-type="percentage">
              <text:p>25 %</text:p>
            </table:table-cell>
            <table:table-cell table:style-name="ce15" office:value-type="percentage" office:value="-0.2" calcext:value-type="percentage">
              <text:p>-20 %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ce4" office:value-type="string" calcext:value-type="string">
            <text:p>Celdas de resultado:</text:p>
          </table:table-cell>
          <table:table-cell table:style-name="ce4"/>
          <table:table-cell table:style-name="ce9" table:number-columns-repeated="4"/>
          <table:table-cell table:number-columns-repeated="16377"/>
        </table:table-row>
        <table:table-row-group>
          <table:table-row table:style-name="ro1">
            <table:table-cell/>
            <table:table-cell office:value-type="string" calcext:value-type="string">
              <text:p>VANE</text:p>
            </table:table-cell>
            <table:table-cell/>
            <table:table-cell table:number-columns-repeated="2" table:style-name="ce11" office:value-type="float" office:value="63367.9739713203" calcext:value-type="float">
              <text:p>63,367.97</text:p>
            </table:table-cell>
            <table:table-cell table:style-name="ce11" office:value-type="float" office:value="-74307.5557806393" calcext:value-type="float">
              <text:p>-74,307.56</text:p>
            </table:table-cell>
            <table:table-cell table:style-name="ce11" office:value-type="float" office:value="157678.03228803" calcext:value-type="float">
              <text:p>157,678.03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TIRE</text:p>
            </table:table-cell>
            <table:table-cell/>
            <table:table-cell table:number-columns-repeated="2" table:style-name="ce12" office:value-type="percentage" office:value="1.09676588519814" calcext:value-type="percentage">
              <text:p>109.68 %</text:p>
            </table:table-cell>
            <table:table-cell table:style-name="ce12" office:value-type="percentage" office:value="-0.293060321369193" calcext:value-type="percentage">
              <text:p>-29.31 %</text:p>
            </table:table-cell>
            <table:table-cell table:style-name="ce12" office:value-type="percentage" office:value="2.60966378741529" calcext:value-type="percentage">
              <text:p>260.97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NF</text:p>
            </table:table-cell>
            <table:table-cell/>
            <table:table-cell table:number-columns-repeated="2" table:style-name="ce11" office:value-type="float" office:value="63977.6374492788" calcext:value-type="float">
              <text:p>63,977.64</text:p>
            </table:table-cell>
            <table:table-cell table:style-name="ce11" office:value-type="float" office:value="-73630.4696193304" calcext:value-type="float">
              <text:p>-73,630.47</text:p>
            </table:table-cell>
            <table:table-cell table:style-name="ce11" office:value-type="float" office:value="158233.757619309" calcext:value-type="float">
              <text:p>158,233.76</text:p>
            </table:table-cell>
            <table:table-cell table:number-columns-repeated="16377"/>
          </table:table-row>
          <table:table-row table:style-name="ro1">
            <table:table-cell/>
            <table:table-cell table:style-name="ce5" office:value-type="string" calcext:value-type="string">
              <text:p>TIRF</text:p>
            </table:table-cell>
            <table:table-cell table:style-name="ce5"/>
            <table:table-cell table:number-columns-repeated="2" table:style-name="ce13" office:value-type="percentage" office:value="1.10990571739916" calcext:value-type="percentage">
              <text:p>110.99 %</text:p>
            </table:table-cell>
            <table:table-cell table:style-name="ce13" office:value-type="percentage" office:value="-0.291789447832272" calcext:value-type="percentage">
              <text:p>-29.18 %</text:p>
            </table:table-cell>
            <table:table-cell table:style-name="ce13" office:value-type="percentage" office:value="2.62592380551735" calcext:value-type="percentage">
              <text:p>262.59 %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Default" office:value-type="string" calcext:value-type="string">
            <text:p>Notas: La columna de valores actuales representa los valores de las celdas cambiante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en el momento en que se creó el Informe resumen de escenario. Las celdas cambiantes d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cada escenario se muestran en gris.</text:p>
          </table:table-cell>
          <table:table-cell table:style-name="Default"/>
          <table:table-cell table:number-columns-repeated="16381"/>
        </table:table-row>
      </table:table>
      <table:table table:name="Análisis de sensibilidad" table:style-name="ta2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4" table:number-columns-repeated="5" table:default-cell-style-name="ce16"/>
        <table:table-column table:style-name="co7" table:number-columns-repeated="4" table:default-cell-style-name="ce16"/>
        <table:table-column table:style-name="co4" table:number-columns-repeated="16372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26" office:value-type="string" calcext:value-type="string">
            <text:p>Valor de venta A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49" office:value-type="percentage" office:value="-0.429448966465771" calcext:value-type="percentage">
            <text:p>-42.94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Valor de venta B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0" office:value-type="percentage" office:value="-0.541218213710032" calcext:value-type="percentage">
            <text:p>-54.12 %</text:p>
          </table:table-cell>
          <table:table-cell table:number-columns-repeated="4"/>
          <table:table-cell table:style-name="ce22" office:value-type="string" calcext:value-type="string">
            <text:p>VANE</text:p>
          </table:table-cell>
          <table:table-cell table:style-name="ce22" office:value-type="string" calcext:value-type="string">
            <text:p>TIRE</text:p>
          </table:table-cell>
          <table:table-cell table:style-name="ce22" office:value-type="string" calcext:value-type="string">
            <text:p>VANF</text:p>
          </table:table-cell>
          <table:table-cell table:style-name="ce22" office:value-type="string" calcext:value-type="string">
            <text:p>TIRF</text:p>
          </table:table-cell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Valor de venta C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-0.607762870157304" calcext:value-type="percentage">
            <text:p>-60.78 %</text:p>
          </table:table-cell>
          <table:table-cell table:number-columns-repeated="4"/>
          <table:table-cell table:style-name="ce66" table:formula="of:=+[$Rentabilidad.D12]" office:value-type="float" office:value="34909.5300479208" calcext:value-type="float">
            <text:p>34,909.53</text:p>
          </table:table-cell>
          <table:table-cell table:style-name="ce68" table:formula="of:=+[$Rentabilidad.D14]" office:value-type="percentage" office:value="0.803590613835939" calcext:value-type="percentage">
            <text:p>80.36 %</text:p>
          </table:table-cell>
          <table:table-cell table:style-name="ce66" table:formula="of:=+[$Rentabilidad.D25]" office:value-type="float" office:value="35367.5982591573" calcext:value-type="float">
            <text:p>35,367.60</text:p>
          </table:table-cell>
          <table:table-cell table:style-name="ce72" table:formula="of:=+[$Rentabilidad.D27]" office:value-type="percentage" office:value="0.812983685869219" calcext:value-type="percentage">
            <text:p>81.30 %</text:p>
          </table:table-cell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Mano de Obra A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02858608706265" calcext:value-type="percentage">
            <text:p>202.86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Mano de Obra B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25656328230312" calcext:value-type="percentage">
            <text:p>225.66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Mano de Obra C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82127837220348" calcext:value-type="percentage">
            <text:p>282.13 %</text:p>
          </table:table-cell>
          <table:table-cell table:number-columns-repeated="6"/>
          <table:table-cell table:style-name="ce10" table:number-columns-repeated="2"/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Valor hilado de alpaca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0" office:value-type="percentage" office:value="0.340139399987506" calcext:value-type="percentage">
            <text:p>34.01 %</text:p>
          </table:table-cell>
          <table:table-cell table:number-columns-repeated="6"/>
          <table:table-cell table:style-name="ce10" table:number-columns-repeated="2"/>
          <table:table-cell table:number-columns-repeated="16372"/>
        </table:table-row>
        <table:table-row table:style-name="ro1">
          <table:table-cell/>
          <table:table-cell table:style-name="ce26"/>
          <table:table-cell table:style-name="ce38"/>
          <table:table-cell table:style-name="ce26"/>
          <table:table-cell/>
          <table:table-cell table:style-name="ce63"/>
          <table:table-cell table:style-name="ce65"/>
          <table:table-cell table:number-columns-repeated="3"/>
          <table:table-cell table:style-name="ce1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69"/>
          <table:table-cell table:style-name="ce70"/>
          <table:table-cell table:style-name="ce73"/>
          <table:table-cell table:style-name="ce70"/>
          <table:table-cell table:number-columns-repeated="16371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70" table:number-columns-repeated="2"/>
          <table:table-cell table:style-name="ce73"/>
          <table:table-cell table:style-name="ce70"/>
          <table:table-cell table:number-columns-repeated="16371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71" table:number-columns-repeated="2"/>
          <table:table-cell table:style-name="ce67"/>
          <table:table-cell table:style-name="ce71"/>
          <table:table-cell table:number-columns-repeated="16371"/>
        </table:table-row>
        <table:table-row table:style-name="ro1" table:number-rows-repeated="4">
          <table:table-cell table:number-columns-repeated="2"/>
          <table:table-cell table:style-name="ce39"/>
          <table:table-cell table:style-name="ce26"/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Tipo de cambio Dólar</text:p>
          </table:table-cell>
          <table:table-cell table:style-name="ce39"/>
          <table:table-cell table:style-name="ce26"/>
          <table:table-cell/>
          <table:table-cell table:style-name="ce26" table:number-columns-repeated="2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Análisis de sensibilidad unidimension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1. <text:span text:style-name="T1">Sensibilidad de</text:span><text:span text:style-name="T2"> valor de venta A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19" office:value-type="string" calcext:value-type="string" table:number-columns-spanned="1" table:number-rows-spanned="2">
            <text:p>precio</text:p>
          </table:table-cell>
          <table:table-cell table:style-name="ce27" office:value-type="string" calcext:value-type="string">
            <text:p>Valor de Venta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covered-table-cell table:style-name="ce19"/>
          <table:table-cell table:style-name="ce27"/>
          <table:table-cell table:style-name="ce41" table:formula="of:=+[$Rentabilidad.D12]" office:value-type="float" office:value="34909.5300479208" calcext:value-type="float">
            <text:p><text:s/>34,910 </text:p>
          </table:table-cell>
          <table:table-cell table:style-name="ce52" table:formula="of:=+[$Rentabilidad.D14]" office:value-type="percentage" office:value="0.803590613835939" calcext:value-type="percentage">
            <text:p>80.36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56" table:formula="of:=+[$Rentabilidad.D27]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0" table:formula="of:=+[.$A$30]*(1+[.B25])" office:value-type="float" office:value="70.7684801728395" calcext:value-type="float">
            <text:p>70.77</text:p>
          </table:table-cell>
          <table:table-cell table:style-name="ce28" office:value-type="percentage" office:value="-0.5" calcext:value-type="percentage">
            <text:p>-50 %</text:p>
          </table:table-cell>
          <table:table-cell table:style-name="ce42" table:formula="of:=MULTIPLE.OPERATIONS([.C$24];[.$C$2];[.$B25])" office:value-type="float" office:value="-30774.2576590677" calcext:value-type="float">
            <text:p>-30,774</text:p>
          </table:table-cell>
          <table:table-cell table:style-name="ce30" table:formula="of:=MULTIPLE.OPERATIONS([.D$24];[.$C$2];[.$B25])" office:value-type="string" office:string-value="" calcext:value-type="error">
            <text:p>Err:523</text:p>
          </table:table-cell>
          <table:table-cell table:style-name="ce42" office:value-type="float" office:value="-30316.1894478311" calcext:value-type="float">
            <text:p>-30,316</text:p>
          </table:table-cell>
          <table:table-cell table:style-name="ce30" office:value-type="percentage" office:value="-0.366426572395436" calcext:value-type="percentage">
            <text:p>-37 %</text:p>
          </table:table-cell>
          <table:table-cell table:number-columns-repeated="16378"/>
        </table:table-row>
        <table:table-row table:style-name="ro1">
          <table:table-cell table:style-name="ce20" table:formula="of:=+[.$A$30]*(1+[.B26])" office:value-type="float" office:value="80.7540590085203" calcext:value-type="float">
            <text:p>80.75</text:p>
          </table:table-cell>
          <table:table-cell table:style-name="ce28" table:formula="of:=+[.D2]" office:value-type="percentage" office:value="-0.429448966465771" calcext:value-type="percentage">
            <text:p>-43 %</text:p>
          </table:table-cell>
          <table:table-cell table:style-name="ce42" table:formula="of:=MULTIPLE.OPERATIONS([.C$24];[.$C$2];[.$B26])" office:value-type="float" office:value="-21506.1394407258" calcext:value-type="float">
            <text:p>-21,506</text:p>
          </table:table-cell>
          <table:table-cell table:style-name="ce30" table:formula="of:=MULTIPLE.OPERATIONS([.D$24];[.$C$2];[.$B26])" office:value-type="percentage" office:value="-0.195200019900551" calcext:value-type="percentage">
            <text:p>-20 %</text:p>
          </table:table-cell>
          <table:table-cell table:style-name="ce42" office:value-type="float" office:value="-21048.0712294893" calcext:value-type="float">
            <text:p>-21,048</text:p>
          </table:table-cell>
          <table:table-cell table:style-name="ce30" office:value-type="percentage" office:value="-0.18918186621677" calcext:value-type="percentage">
            <text:p>-19 %</text:p>
          </table:table-cell>
          <table:table-cell table:number-columns-repeated="16378"/>
        </table:table-row>
        <table:table-row table:style-name="ro1">
          <table:table-cell table:style-name="ce20" table:formula="of:=+[.$A$30]*(1+[.B27])" office:value-type="float" office:value="99.0758722419753" calcext:value-type="float">
            <text:p>99.08</text:p>
          </table:table-cell>
          <table:table-cell table:style-name="ce28" office:value-type="percentage" office:value="-0.3" calcext:value-type="percentage">
            <text:p>-30 %</text:p>
          </table:table-cell>
          <table:table-cell table:style-name="ce42" table:formula="of:=MULTIPLE.OPERATIONS([.C$24];[.$C$2];[.$B27])" office:value-type="float" office:value="-4500.74257627228" calcext:value-type="float">
            <text:p>-4,501</text:p>
          </table:table-cell>
          <table:table-cell table:style-name="ce30" table:formula="of:=MULTIPLE.OPERATIONS([.D$24];[.$C$2];[.$B27])" office:value-type="percentage" office:value="0.115708947440038" calcext:value-type="percentage">
            <text:p>12 %</text:p>
          </table:table-cell>
          <table:table-cell table:style-name="ce42" office:value-type="float" office:value="-4042.67436503581" calcext:value-type="float">
            <text:p>-4,043</text:p>
          </table:table-cell>
          <table:table-cell table:style-name="ce30" office:value-type="percentage" office:value="0.123136149667076" calcext:value-type="percentage">
            <text:p>12 %</text:p>
          </table:table-cell>
          <table:table-cell table:number-columns-repeated="16378"/>
        </table:table-row>
        <table:table-row table:style-name="ro1">
          <table:table-cell table:style-name="ce20" table:formula="of:=+[.$A$30]*(1+[.B28])" office:value-type="float" office:value="113.229568276543" calcext:value-type="float">
            <text:p>113.23</text:p>
          </table:table-cell>
          <table:table-cell table:style-name="ce28" office:value-type="percentage" office:value="-0.2" calcext:value-type="percentage">
            <text:p>-20 %</text:p>
          </table:table-cell>
          <table:table-cell table:style-name="ce42" table:formula="of:=MULTIPLE.OPERATIONS([.C$24];[.$C$2];[.$B28])" office:value-type="float" office:value="8636.01496512541" calcext:value-type="float">
            <text:p>8,636</text:p>
          </table:table-cell>
          <table:table-cell table:style-name="ce30" table:formula="of:=MULTIPLE.OPERATIONS([.D$24];[.$C$2];[.$B28])" office:value-type="percentage" office:value="0.348648721532162" calcext:value-type="percentage">
            <text:p>35 %</text:p>
          </table:table-cell>
          <table:table-cell table:style-name="ce42" office:value-type="float" office:value="9094.08317636192" calcext:value-type="float">
            <text:p>9,094</text:p>
          </table:table-cell>
          <table:table-cell table:style-name="ce30" office:value-type="percentage" office:value="0.356879807879146" calcext:value-type="percentage">
            <text:p>36 %</text:p>
          </table:table-cell>
          <table:table-cell table:number-columns-repeated="16378"/>
        </table:table-row>
        <table:table-row table:style-name="ro1">
          <table:table-cell table:style-name="ce20" table:formula="of:=+[.$A$30]*(1+[.B29])" office:value-type="float" office:value="127.383264311111" calcext:value-type="float">
            <text:p>127.38</text:p>
          </table:table-cell>
          <table:table-cell table:style-name="ce28" office:value-type="percentage" office:value="-0.1" calcext:value-type="percentage">
            <text:p>-10 %</text:p>
          </table:table-cell>
          <table:table-cell table:style-name="ce42" table:formula="of:=MULTIPLE.OPERATIONS([.C$24];[.$C$2];[.$B29])" office:value-type="float" office:value="21772.7725065231" calcext:value-type="float">
            <text:p>21,773</text:p>
          </table:table-cell>
          <table:table-cell table:style-name="ce30" table:formula="of:=MULTIPLE.OPERATIONS([.D$24];[.$C$2];[.$B29])" office:value-type="percentage" office:value="0.577529173535428" calcext:value-type="percentage">
            <text:p>58 %</text:p>
          </table:table-cell>
          <table:table-cell table:style-name="ce42" office:value-type="float" office:value="22230.8407177597" calcext:value-type="float">
            <text:p>22,231</text:p>
          </table:table-cell>
          <table:table-cell table:style-name="ce30" office:value-type="percentage" office:value="0.586400280865882" calcext:value-type="percentage">
            <text:p>59 %</text:p>
          </table:table-cell>
          <table:table-cell table:number-columns-repeated="16378"/>
        </table:table-row>
        <table:table-row table:style-name="ro1">
          <table:table-cell table:style-name="ce21" table:formula="of:=+[$Resumen.C13]" office:value-type="float" office:value="141.536960345679" calcext:value-type="float">
            <text:p>141.54</text:p>
          </table:table-cell>
          <table:table-cell table:style-name="ce29" office:value-type="percentage" office:value="0" calcext:value-type="percentage">
            <text:p>0 %</text:p>
          </table:table-cell>
          <table:table-cell table:style-name="ce43" table:formula="of:=MULTIPLE.OPERATIONS([.C$24];[.$C$2];[.$B30])" office:value-type="float" office:value="34909.5300479208" calcext:value-type="float">
            <text:p>34,910</text:p>
          </table:table-cell>
          <table:table-cell table:style-name="ce53" table:formula="of:=MULTIPLE.OPERATIONS([.D$24];[.$C$2];[.$B30])" office:value-type="percentage" office:value="0.803590613835939" calcext:value-type="percentage">
            <text:p>80.4%</text:p>
          </table:table-cell>
          <table:table-cell table:style-name="ce43" office:value-type="float" office:value="35367.5982591572" calcext:value-type="float">
            <text:p>35,368</text:p>
          </table:table-cell>
          <table:table-cell table:style-name="ce53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0" table:formula="of:=+[.$A$30]*(1+[.B31])" office:value-type="float" office:value="155.690656380247" calcext:value-type="float">
            <text:p>155.69</text:p>
          </table:table-cell>
          <table:table-cell table:style-name="ce30" office:value-type="percentage" office:value="0.1" calcext:value-type="percentage">
            <text:p>10 %</text:p>
          </table:table-cell>
          <table:table-cell table:style-name="ce44" table:formula="of:=MULTIPLE.OPERATIONS([.C$24];[.$C$2];[.$B31])" office:value-type="float" office:value="48046.2875893185" calcext:value-type="float">
            <text:p>48,046</text:p>
          </table:table-cell>
          <table:table-cell table:style-name="ce54" table:formula="of:=MULTIPLE.OPERATIONS([.D$24];[.$C$2];[.$B31])" office:value-type="percentage" office:value="1.02763803834445" calcext:value-type="percentage">
            <text:p>102.8%</text:p>
          </table:table-cell>
          <table:table-cell table:style-name="ce44" office:value-type="float" office:value="48504.355800555" calcext:value-type="float">
            <text:p>48,504</text:p>
          </table:table-cell>
          <table:table-cell table:style-name="ce54" office:value-type="percentage" office:value="1.03746496749298" calcext:value-type="percentage">
            <text:p>103.7%</text:p>
          </table:table-cell>
          <table:table-cell table:number-columns-repeated="16378"/>
        </table:table-row>
        <table:table-row table:style-name="ro1">
          <table:table-cell table:style-name="ce20" table:formula="of:=+[.$A$30]*(1+[.B32])" office:value-type="float" office:value="169.844352414815" calcext:value-type="float">
            <text:p>169.84</text:p>
          </table:table-cell>
          <table:table-cell table:style-name="ce30" office:value-type="percentage" office:value="0.2" calcext:value-type="percentage">
            <text:p>20 %</text:p>
          </table:table-cell>
          <table:table-cell table:style-name="ce44" table:formula="of:=MULTIPLE.OPERATIONS([.C$24];[.$C$2];[.$B32])" office:value-type="float" office:value="61183.0451307161" calcext:value-type="float">
            <text:p>61,183</text:p>
          </table:table-cell>
          <table:table-cell table:style-name="ce54" table:formula="of:=MULTIPLE.OPERATIONS([.D$24];[.$C$2];[.$B32])" office:value-type="percentage" office:value="1.25020999820281" calcext:value-type="percentage">
            <text:p>125.0%</text:p>
          </table:table-cell>
          <table:table-cell table:style-name="ce44" office:value-type="float" office:value="61641.1133419526" calcext:value-type="float">
            <text:p>61,641</text:p>
          </table:table-cell>
          <table:table-cell table:style-name="ce54" office:value-type="percentage" office:value="1.26040314389433" calcext:value-type="percentage">
            <text:p>126.0%</text:p>
          </table:table-cell>
          <table:table-cell table:number-columns-repeated="16378"/>
        </table:table-row>
        <table:table-row table:style-name="ro1">
          <table:table-cell table:style-name="ce20" table:formula="of:=+[.$A$30]*(1+[.B33])" office:value-type="float" office:value="183.998048449383" calcext:value-type="float">
            <text:p>184.00</text:p>
          </table:table-cell>
          <table:table-cell table:style-name="ce30" office:value-type="percentage" office:value="0.3" calcext:value-type="percentage">
            <text:p>30 %</text:p>
          </table:table-cell>
          <table:table-cell table:style-name="ce42" table:formula="of:=MULTIPLE.OPERATIONS([.C$24];[.$C$2];[.$B33])" office:value-type="float" office:value="74319.8026721138" calcext:value-type="float">
            <text:p>74,320</text:p>
          </table:table-cell>
          <table:table-cell table:style-name="ce30" table:formula="of:=MULTIPLE.OPERATIONS([.D$24];[.$C$2];[.$B33])" office:value-type="percentage" office:value="1.47167703025423" calcext:value-type="percentage">
            <text:p>147 %</text:p>
          </table:table-cell>
          <table:table-cell table:style-name="ce42" office:value-type="float" office:value="74777.8708833504" calcext:value-type="float">
            <text:p>74,778</text:p>
          </table:table-cell>
          <table:table-cell table:style-name="ce30" office:value-type="percentage" office:value="1.48218326866422" calcext:value-type="percentage">
            <text:p>148 %</text:p>
          </table:table-cell>
          <table:table-cell table:number-columns-repeated="16378"/>
        </table:table-row>
        <table:table-row table:style-name="ro1">
          <table:table-cell table:style-name="ce20" table:formula="of:=+[.$A$30]*(1+[.B34])" office:value-type="float" office:value="198.151744483951" calcext:value-type="float">
            <text:p>198.15</text:p>
          </table:table-cell>
          <table:table-cell table:style-name="ce30" office:value-type="percentage" office:value="0.4" calcext:value-type="percentage">
            <text:p>40 %</text:p>
          </table:table-cell>
          <table:table-cell table:style-name="ce42" table:formula="of:=MULTIPLE.OPERATIONS([.C$24];[.$C$2];[.$B34])" office:value-type="float" office:value="87456.5602135115" calcext:value-type="float">
            <text:p>87,457</text:p>
          </table:table-cell>
          <table:table-cell table:style-name="ce30" table:formula="of:=MULTIPLE.OPERATIONS([.D$24];[.$C$2];[.$B34])" office:value-type="percentage" office:value="1.69230054060301" calcext:value-type="percentage">
            <text:p>169 %</text:p>
          </table:table-cell>
          <table:table-cell table:style-name="ce42" office:value-type="float" office:value="87914.6284247481" calcext:value-type="float">
            <text:p>87,915</text:p>
          </table:table-cell>
          <table:table-cell table:style-name="ce30" office:value-type="percentage" office:value="1.70307736272692" calcext:value-type="percentage">
            <text:p>170 %</text:p>
          </table:table-cell>
          <table:table-cell table:number-columns-repeated="16378"/>
        </table:table-row>
        <table:table-row table:style-name="ro1">
          <table:table-cell table:style-name="ce20" table:formula="of:=+[.$A$30]*(1+[.B35])" office:value-type="float" office:value="212.305440518519" calcext:value-type="float">
            <text:p>212.31</text:p>
          </table:table-cell>
          <table:table-cell table:style-name="ce30" office:value-type="percentage" office:value="0.5" calcext:value-type="percentage">
            <text:p>50 %</text:p>
          </table:table-cell>
          <table:table-cell table:style-name="ce42" table:formula="of:=MULTIPLE.OPERATIONS([.C$24];[.$C$2];[.$B35])" office:value-type="float" office:value="100593.317754909" calcext:value-type="float">
            <text:p>100,593</text:p>
          </table:table-cell>
          <table:table-cell table:style-name="ce55" table:formula="of:=MULTIPLE.OPERATIONS([.D$24];[.$C$2];[.$B35])" office:value-type="percentage" office:value="1.91226908784899" calcext:value-type="percentage">
            <text:p>191.23 %</text:p>
          </table:table-cell>
          <table:table-cell table:style-name="ce42" office:value-type="float" office:value="101051.385966146" calcext:value-type="float">
            <text:p>101,051</text:p>
          </table:table-cell>
          <table:table-cell table:style-name="ce55" office:value-type="percentage" office:value="1.92328194320972" calcext:value-type="percentage">
            <text:p>192.33 %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1. <text:span text:style-name="T1">Sensibilidad de</text:span><text:span text:style-name="T2"> valor de venta B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19" office:value-type="string" calcext:value-type="string" table:number-columns-spanned="1" table:number-rows-spanned="2">
            <text:p>Precio</text:p>
          </table:table-cell>
          <table:table-cell table:style-name="ce31" office:value-type="string" calcext:value-type="string">
            <text:p>Valor de Venta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covered-table-cell table:style-name="ce19"/>
          <table:table-cell table:style-name="ce31"/>
          <table:table-cell table:style-name="ce41" table:formula="of:=+[$Rentabilidad.D12]" office:value-type="float" office:value="34909.5300479208" calcext:value-type="float">
            <text:p><text:s/>34,910 </text:p>
          </table:table-cell>
          <table:table-cell table:style-name="ce52" table:formula="of:=+[$Rentabilidad.D14]" office:value-type="percentage" office:value="0.803590613835939" calcext:value-type="percentage">
            <text:p>80.36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64" table:formula="of:=+[$Rentabilidad.D27]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2" table:formula="of:=+[.$A$46]*(1+[.B41])" office:value-type="float" office:value="38.8952294543211" calcext:value-type="float">
            <text:p>38.8952294543211</text:p>
          </table:table-cell>
          <table:table-cell table:style-name="ce28" office:value-type="percentage" office:value="-0.65" calcext:value-type="percentage">
            <text:p>-65 %</text:p>
          </table:table-cell>
          <table:table-cell table:style-name="ce42" table:formula="of:=MULTIPLE.OPERATIONS([.C$40];[.$C$3];[.$B41])" office:value-type="float" office:value="-32491.6160732769" calcext:value-type="float">
            <text:p>-32,492</text:p>
          </table:table-cell>
          <table:table-cell table:style-name="ce30" table:formula="of:=MULTIPLE.OPERATIONS([.D$40];[.$C$3];[.$B41])" office:value-type="string" office:string-value="" calcext:value-type="error">
            <text:p>Err:523</text:p>
          </table:table-cell>
          <table:table-cell table:style-name="ce42" office:value-type="float" office:value="-32033.5478620403" calcext:value-type="float">
            <text:p>-32,034</text:p>
          </table:table-cell>
          <table:table-cell table:style-name="ce30" office:value-type="percentage" office:value="-0.405823392755097" calcext:value-type="percentage">
            <text:p>-41 %</text:p>
          </table:table-cell>
          <table:table-cell table:number-columns-repeated="16378"/>
        </table:table-row>
        <table:table-row table:style-name="ro1">
          <table:table-cell table:style-name="ce22" table:formula="of:=+[.$A$46]*(1+[.B42])" office:value-type="float" office:value="44.4516908049384" calcext:value-type="float">
            <text:p>44.4516908049384</text:p>
          </table:table-cell>
          <table:table-cell table:style-name="ce28" office:value-type="percentage" office:value="-0.6" calcext:value-type="percentage">
            <text:p>-60 %</text:p>
          </table:table-cell>
          <table:table-cell table:style-name="ce42" table:formula="of:=MULTIPLE.OPERATIONS([.C$40];[.$C$3];[.$B42])" office:value-type="float" office:value="-27306.9125254924" calcext:value-type="float">
            <text:p>-27,307</text:p>
          </table:table-cell>
          <table:table-cell table:style-name="ce30" table:formula="of:=MULTIPLE.OPERATIONS([.D$40];[.$C$3];[.$B42])" office:value-type="string" office:string-value="" calcext:value-type="error">
            <text:p>Err:523</text:p>
          </table:table-cell>
          <table:table-cell table:style-name="ce42" office:value-type="float" office:value="-26848.8443142558" calcext:value-type="float">
            <text:p>-26,849</text:p>
          </table:table-cell>
          <table:table-cell table:style-name="ce30" office:value-type="percentage" office:value="-0.303433481740861" calcext:value-type="percentage">
            <text:p>-30 %</text:p>
          </table:table-cell>
          <table:table-cell table:number-columns-repeated="16378"/>
        </table:table-row>
        <table:table-row table:style-name="ro1">
          <table:table-cell table:style-name="ce22" table:formula="of:=+[.$A$46]*(1+[.B43])" office:value-type="float" office:value="50.9840652777475" calcext:value-type="float">
            <text:p>50.9840652777475</text:p>
          </table:table-cell>
          <table:table-cell table:style-name="ce28" table:formula="of:=+[.D3]" office:value-type="percentage" office:value="-0.541218213710032" calcext:value-type="percentage">
            <text:p>-54 %</text:p>
          </table:table-cell>
          <table:table-cell table:style-name="ce42" table:formula="of:=MULTIPLE.OPERATIONS([.C$40];[.$C$3];[.$B43])" office:value-type="float" office:value="-21211.5898070384" calcext:value-type="float">
            <text:p>-21,212</text:p>
          </table:table-cell>
          <table:table-cell table:style-name="ce30" table:formula="of:=MULTIPLE.OPERATIONS([.D$40];[.$C$3];[.$B43])" office:value-type="percentage" office:value="-0.19224661008741" calcext:value-type="percentage">
            <text:p>-19 %</text:p>
          </table:table-cell>
          <table:table-cell table:style-name="ce42" office:value-type="float" office:value="-20753.5215958018" calcext:value-type="float">
            <text:p>-20,754</text:p>
          </table:table-cell>
          <table:table-cell table:style-name="ce30" office:value-type="percentage" office:value="-0.186161755667412" calcext:value-type="percentage">
            <text:p>-19 %</text:p>
          </table:table-cell>
          <table:table-cell table:number-columns-repeated="16378"/>
        </table:table-row>
        <table:table-row table:style-name="ro1">
          <table:table-cell table:style-name="ce22" table:formula="of:=+[.$A$46]*(1+[.B44])" office:value-type="float" office:value="77.7904589086422" calcext:value-type="float">
            <text:p>77.7904589086422</text:p>
          </table:table-cell>
          <table:table-cell table:style-name="ce28" office:value-type="percentage" office:value="-0.3" calcext:value-type="percentage">
            <text:p>-30 %</text:p>
          </table:table-cell>
          <table:table-cell table:style-name="ce42" table:formula="of:=MULTIPLE.OPERATIONS([.C$40];[.$C$3];[.$B44])" office:value-type="float" office:value="3801.30876121417" calcext:value-type="float">
            <text:p>3,801</text:p>
          </table:table-cell>
          <table:table-cell table:style-name="ce30" table:formula="of:=MULTIPLE.OPERATIONS([.D$40];[.$C$3];[.$B44])" office:value-type="percentage" office:value="0.263649549997071" calcext:value-type="percentage">
            <text:p>26 %</text:p>
          </table:table-cell>
          <table:table-cell table:style-name="ce42" office:value-type="float" office:value="4259.37697245072" calcext:value-type="float">
            <text:p>4,259</text:p>
          </table:table-cell>
          <table:table-cell table:style-name="ce30" office:value-type="percentage" office:value="0.27162706552993" calcext:value-type="percentage">
            <text:p>27 %</text:p>
          </table:table-cell>
          <table:table-cell table:number-columns-repeated="16378"/>
        </table:table-row>
        <table:table-row table:style-name="ro1">
          <table:table-cell table:style-name="ce22" table:formula="of:=+[.$A$46]*(1+[.B45])" office:value-type="float" office:value="94.4598429604941" calcext:value-type="float">
            <text:p>94.4598429604941</text:p>
          </table:table-cell>
          <table:table-cell table:style-name="ce28" office:value-type="percentage" office:value="-0.15" calcext:value-type="percentage">
            <text:p>-15 %</text:p>
          </table:table-cell>
          <table:table-cell table:style-name="ce42" table:formula="of:=MULTIPLE.OPERATIONS([.C$40];[.$C$3];[.$B45])" office:value-type="float" office:value="19355.4194045675" calcext:value-type="float">
            <text:p>19,355</text:p>
          </table:table-cell>
          <table:table-cell table:style-name="ce30" table:formula="of:=MULTIPLE.OPERATIONS([.D$40];[.$C$3];[.$B45])" office:value-type="percentage" office:value="0.536017003570077" calcext:value-type="percentage">
            <text:p>54 %</text:p>
          </table:table-cell>
          <table:table-cell table:style-name="ce42" office:value-type="float" office:value="19813.487615804" calcext:value-type="float">
            <text:p>19,813</text:p>
          </table:table-cell>
          <table:table-cell table:style-name="ce30" office:value-type="percentage" office:value="0.544788860170962" calcext:value-type="percentage">
            <text:p>54 %</text:p>
          </table:table-cell>
          <table:table-cell table:number-columns-repeated="16378"/>
        </table:table-row>
        <table:table-row table:style-name="ro1">
          <table:table-cell table:style-name="ce21" table:formula="of:=+[$Resumen.C14]" office:value-type="float" office:value="111.129227012346" calcext:value-type="float">
            <text:p>111.13</text:p>
          </table:table-cell>
          <table:table-cell table:style-name="ce29" office:value-type="percentage" office:value="0" calcext:value-type="percentage">
            <text:p>0 %</text:p>
          </table:table-cell>
          <table:table-cell table:style-name="ce43" table:formula="of:=MULTIPLE.OPERATIONS([.C$40];[.$C$3];[.$B46])" office:value-type="float" office:value="34909.5300479208" calcext:value-type="float">
            <text:p>34,910</text:p>
          </table:table-cell>
          <table:table-cell table:style-name="ce53" table:formula="of:=MULTIPLE.OPERATIONS([.D$40];[.$C$3];[.$B46])" office:value-type="percentage" office:value="0.803590613835939" calcext:value-type="percentage">
            <text:p>80.4%</text:p>
          </table:table-cell>
          <table:table-cell table:style-name="ce43" office:value-type="float" office:value="35367.5982591572" calcext:value-type="float">
            <text:p>35,368</text:p>
          </table:table-cell>
          <table:table-cell table:style-name="ce53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2" table:formula="of:=+[.$A$46]*(1+[.B47])" office:value-type="float" office:value="127.798611064198" calcext:value-type="float">
            <text:p>127.798611064198</text:p>
          </table:table-cell>
          <table:table-cell table:style-name="ce30" office:value-type="percentage" office:value="0.15" calcext:value-type="percentage">
            <text:p>15 %</text:p>
          </table:table-cell>
          <table:table-cell table:style-name="ce44" table:formula="of:=MULTIPLE.OPERATIONS([.C$40];[.$C$3];[.$B47])" office:value-type="float" office:value="50463.6406912741" calcext:value-type="float">
            <text:p>50,464</text:p>
          </table:table-cell>
          <table:table-cell table:style-name="ce54" table:formula="of:=MULTIPLE.OPERATIONS([.D$40];[.$C$3];[.$B47])" office:value-type="percentage" office:value="1.0679931668848" calcext:value-type="percentage">
            <text:p>106.8%</text:p>
          </table:table-cell>
          <table:table-cell table:style-name="ce44" office:value-type="float" office:value="50921.7089025106" calcext:value-type="float">
            <text:p>50,922</text:p>
          </table:table-cell>
          <table:table-cell table:style-name="ce54" office:value-type="percentage" office:value="1.07788610326348" calcext:value-type="percentage">
            <text:p>107.8%</text:p>
          </table:table-cell>
          <table:table-cell table:number-columns-repeated="16378"/>
        </table:table-row>
        <table:table-row table:style-name="ro1">
          <table:table-cell table:style-name="ce22" table:formula="of:=+[.$A$46]*(1+[.B48])" office:value-type="float" office:value="144.46799511605" calcext:value-type="float">
            <text:p>144.46799511605</text:p>
          </table:table-cell>
          <table:table-cell table:style-name="ce30" office:value-type="percentage" office:value="0.3" calcext:value-type="percentage">
            <text:p>30 %</text:p>
          </table:table-cell>
          <table:table-cell table:style-name="ce44" table:formula="of:=MULTIPLE.OPERATIONS([.C$40];[.$C$3];[.$B48])" office:value-type="float" office:value="66017.7513346274" calcext:value-type="float">
            <text:p>66,018</text:p>
          </table:table-cell>
          <table:table-cell table:style-name="ce54" table:formula="of:=MULTIPLE.OPERATIONS([.D$40];[.$C$3];[.$B48])" office:value-type="percentage" office:value="1.33021714853579" calcext:value-type="percentage">
            <text:p>133.0%</text:p>
          </table:table-cell>
          <table:table-cell table:style-name="ce44" office:value-type="float" office:value="66475.819545864" calcext:value-type="float">
            <text:p>66,476</text:p>
          </table:table-cell>
          <table:table-cell table:style-name="ce54" office:value-type="percentage" office:value="1.34052108801212" calcext:value-type="percentage">
            <text:p>134.1%</text:p>
          </table:table-cell>
          <table:table-cell table:number-columns-repeated="16378"/>
        </table:table-row>
        <table:table-row table:style-name="ro1">
          <table:table-cell table:style-name="ce22" table:formula="of:=+[.$A$46]*(1+[.B49])" office:value-type="float" office:value="166.693840518519" calcext:value-type="float">
            <text:p>166.693840518519</text:p>
          </table:table-cell>
          <table:table-cell table:style-name="ce28" office:value-type="percentage" office:value="0.5" calcext:value-type="percentage">
            <text:p>50 %</text:p>
          </table:table-cell>
          <table:table-cell table:style-name="ce42" table:formula="of:=MULTIPLE.OPERATIONS([.C$40];[.$C$3];[.$B49])" office:value-type="float" office:value="86756.5655257651" calcext:value-type="float">
            <text:p>86,757</text:p>
          </table:table-cell>
          <table:table-cell table:style-name="ce30" table:formula="of:=MULTIPLE.OPERATIONS([.D$40];[.$C$3];[.$B49])" office:value-type="percentage" office:value="1.67752303849107" calcext:value-type="percentage">
            <text:p>168 %</text:p>
          </table:table-cell>
          <table:table-cell table:style-name="ce42" office:value-type="float" office:value="87214.6337370016" calcext:value-type="float">
            <text:p>87,215</text:p>
          </table:table-cell>
          <table:table-cell table:style-name="ce30" office:value-type="percentage" office:value="1.68827313263832" calcext:value-type="percentage">
            <text:p>169 %</text:p>
          </table:table-cell>
          <table:table-cell table:number-columns-repeated="16378"/>
        </table:table-row>
        <table:table-row table:style-name="ro1">
          <table:table-cell table:style-name="ce22" table:formula="of:=+[.$A$46]*(1+[.B50])" office:value-type="float" office:value="177.806763219754" calcext:value-type="float">
            <text:p>177.806763219754</text:p>
          </table:table-cell>
          <table:table-cell table:style-name="ce28" office:value-type="percentage" office:value="0.6" calcext:value-type="percentage">
            <text:p>60 %</text:p>
          </table:table-cell>
          <table:table-cell table:style-name="ce42" table:formula="of:=MULTIPLE.OPERATIONS([.C$40];[.$C$3];[.$B50])" office:value-type="float" office:value="97125.972621334" calcext:value-type="float">
            <text:p>97,126</text:p>
          </table:table-cell>
          <table:table-cell table:style-name="ce30" table:formula="of:=MULTIPLE.OPERATIONS([.D$40];[.$C$3];[.$B50])" office:value-type="percentage" office:value="1.85045047404724" calcext:value-type="percentage">
            <text:p>185 %</text:p>
          </table:table-cell>
          <table:table-cell table:style-name="ce42" office:value-type="float" office:value="97584.0408325706" calcext:value-type="float">
            <text:p>97,584</text:p>
          </table:table-cell>
          <table:table-cell table:style-name="ce30" office:value-type="percentage" office:value="1.86138976694606" calcext:value-type="percentage">
            <text:p>186 %</text:p>
          </table:table-cell>
          <table:table-cell table:number-columns-repeated="16378"/>
        </table:table-row>
        <table:table-row table:style-name="ro1">
          <table:table-cell table:style-name="ce22" table:formula="of:=+[.$A$46]*(1+[.B51])" office:value-type="float" office:value="183.363224570371" calcext:value-type="float">
            <text:p>183.363224570371</text:p>
          </table:table-cell>
          <table:table-cell table:style-name="ce28" office:value-type="percentage" office:value="0.65" calcext:value-type="percentage">
            <text:p>65 %</text:p>
          </table:table-cell>
          <table:table-cell table:style-name="ce42" table:formula="of:=MULTIPLE.OPERATIONS([.C$40];[.$C$3];[.$B51])" office:value-type="float" office:value="102310.676169118" calcext:value-type="float">
            <text:p>102,311</text:p>
          </table:table-cell>
          <table:table-cell table:style-name="ce55" table:formula="of:=MULTIPLE.OPERATIONS([.D$40];[.$C$3];[.$B51])" office:value-type="percentage" office:value="1.9367708891359" calcext:value-type="percentage">
            <text:p>193.68 %</text:p>
          </table:table-cell>
          <table:table-cell table:style-name="ce42" office:value-type="float" office:value="102768.744380355" calcext:value-type="float">
            <text:p>102,769</text:p>
          </table:table-cell>
          <table:table-cell table:style-name="ce55" office:value-type="percentage" office:value="1.94779774779337" calcext:value-type="percentage">
            <text:p>194.78 %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2. <text:span text:style-name="T1">Sensibilidad de</text:span><text:span text:style-name="T2"> valor del hilado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23"/>
          <table:table-cell table:style-name="ce31" office:value-type="string" calcext:value-type="string">
            <text:p>Valor del Hilado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31"/>
          <table:table-cell table:style-name="ce45" table:formula="of:=+[$Rentabilidad.D12]" office:value-type="float" office:value="34909.5300479208" calcext:value-type="float">
            <text:p>34909.5</text:p>
          </table:table-cell>
          <table:table-cell table:style-name="ce56" table:formula="of:=+[$Rentabilidad.D14]" office:value-type="percentage" office:value="0.803590613835939" calcext:value-type="percentage">
            <text:p>80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56" table:formula="of:=+[$Rentabilidad.D27]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4" table:formula="of:=+[.$A$62]*(1+[.B57])" office:value-type="float" office:value="3.9" calcext:value-type="float">
            <text:p>3.9</text:p>
          </table:table-cell>
          <table:table-cell table:style-name="ce32" office:value-type="percentage" office:value="-0.5" calcext:value-type="percentage">
            <text:p>-50 %</text:p>
          </table:table-cell>
          <table:table-cell table:style-name="ce46" table:formula="of:=MULTIPLE.OPERATIONS([.C$56];[.$C$8];[.$B57])" office:value-type="float" office:value="105642.338278237" calcext:value-type="float">
            <text:p>105642.3</text:p>
          </table:table-cell>
          <table:table-cell table:style-name="ce57" table:formula="of:=MULTIPLE.OPERATIONS([.D$56];[.$C$8];[.$B57])" office:value-type="percentage" office:value="2.2798974742592" calcext:value-type="percentage">
            <text:p>228 %</text:p>
          </table:table-cell>
          <table:table-cell table:style-name="ce60" office:value-type="float" office:value="105965.420966627" calcext:value-type="float">
            <text:p>105,965</text:p>
          </table:table-cell>
          <table:table-cell table:style-name="ce57" office:value-type="percentage" office:value="2.2891607584836" calcext:value-type="percentage">
            <text:p>229 %</text:p>
          </table:table-cell>
          <table:table-cell table:number-columns-repeated="16378"/>
        </table:table-row>
        <table:table-row table:style-name="ro1">
          <table:table-cell table:style-name="ce24" table:formula="of:=+[.$A$62]*(1+[.B58])" office:value-type="float" office:value="4.13758144572192" calcext:value-type="float">
            <text:p>4.1</text:p>
          </table:table-cell>
          <table:table-cell table:style-name="ce32" office:value-type="percentage" office:value="-0.469540840292061" calcext:value-type="percentage">
            <text:p>-47 %</text:p>
          </table:table-cell>
          <table:table-cell table:style-name="ce46" table:formula="of:=MULTIPLE.OPERATIONS([.C$56];[.$C$8];[.$B58])" office:value-type="float" office:value="101333.41447328" calcext:value-type="float">
            <text:p>101333.4</text:p>
          </table:table-cell>
          <table:table-cell table:style-name="ce57" table:formula="of:=MULTIPLE.OPERATIONS([.D$56];[.$C$8];[.$B58])" office:value-type="percentage" office:value="2.17773719742758" calcext:value-type="percentage">
            <text:p>218 %</text:p>
          </table:table-cell>
          <table:table-cell table:style-name="ce60" office:value-type="float" office:value="101664.720252868" calcext:value-type="float">
            <text:p>101,665</text:p>
          </table:table-cell>
          <table:table-cell table:style-name="ce57" office:value-type="percentage" office:value="2.18707536634134" calcext:value-type="percentage">
            <text:p>219 %</text:p>
          </table:table-cell>
          <table:table-cell table:number-columns-repeated="16378"/>
        </table:table-row>
        <table:table-row table:style-name="ro1">
          <table:table-cell table:style-name="ce24" table:formula="of:=+[.$A$62]*(1+[.B59])" office:value-type="float" office:value="5.46" calcext:value-type="float">
            <text:p>5.5</text:p>
          </table:table-cell>
          <table:table-cell table:style-name="ce32" office:value-type="percentage" office:value="-0.3" calcext:value-type="percentage">
            <text:p>-30 %</text:p>
          </table:table-cell>
          <table:table-cell table:style-name="ce46" table:formula="of:=MULTIPLE.OPERATIONS([.C$56];[.$C$8];[.$B59])" office:value-type="float" office:value="77349.2149861105" calcext:value-type="float">
            <text:p>77349.2</text:p>
          </table:table-cell>
          <table:table-cell table:style-name="ce57" table:formula="of:=MULTIPLE.OPERATIONS([.D$56];[.$C$8];[.$B59])" office:value-type="percentage" office:value="1.64107584854492" calcext:value-type="percentage">
            <text:p>164 %</text:p>
          </table:table-cell>
          <table:table-cell table:style-name="ce60" office:value-type="float" office:value="77726.2918836392" calcext:value-type="float">
            <text:p>77,726</text:p>
          </table:table-cell>
          <table:table-cell table:style-name="ce57" office:value-type="percentage" office:value="1.65068672211529" calcext:value-type="percentage">
            <text:p>165 %</text:p>
          </table:table-cell>
          <table:table-cell table:number-columns-repeated="16378"/>
        </table:table-row>
        <table:table-row table:style-name="ro1">
          <table:table-cell table:style-name="ce24" table:formula="of:=+[.$A$62]*(1+[.B60])" office:value-type="float" office:value="6.24" calcext:value-type="float">
            <text:p>6.2</text:p>
          </table:table-cell>
          <table:table-cell table:style-name="ce32" office:value-type="percentage" office:value="-0.2" calcext:value-type="percentage">
            <text:p>-20 %</text:p>
          </table:table-cell>
          <table:table-cell table:style-name="ce46" table:formula="of:=MULTIPLE.OPERATIONS([.C$56];[.$C$8];[.$B60])" office:value-type="float" office:value="63202.6533400472" calcext:value-type="float">
            <text:p>63202.7</text:p>
          </table:table-cell>
          <table:table-cell table:style-name="ce57" table:formula="of:=MULTIPLE.OPERATIONS([.D$56];[.$C$8];[.$B60])" office:value-type="percentage" office:value="1.34749661383101" calcext:value-type="percentage">
            <text:p>135 %</text:p>
          </table:table-cell>
          <table:table-cell table:style-name="ce60" office:value-type="float" office:value="63606.7273421452" calcext:value-type="float">
            <text:p>63,607</text:p>
          </table:table-cell>
          <table:table-cell table:style-name="ce57" office:value-type="percentage" office:value="1.35714436897273" calcext:value-type="percentage">
            <text:p>136 %</text:p>
          </table:table-cell>
          <table:table-cell table:number-columns-repeated="16378"/>
        </table:table-row>
        <table:table-row table:style-name="ro1">
          <table:table-cell table:style-name="ce24" table:formula="of:=+[.$A$62]*(1+[.B61])" office:value-type="float" office:value="7.02" calcext:value-type="float">
            <text:p>7.0</text:p>
          </table:table-cell>
          <table:table-cell table:style-name="ce32" office:value-type="percentage" office:value="-0.1" calcext:value-type="percentage">
            <text:p>-10 %</text:p>
          </table:table-cell>
          <table:table-cell table:style-name="ce46" table:formula="of:=MULTIPLE.OPERATIONS([.C$56];[.$C$8];[.$B61])" office:value-type="float" office:value="49056.091693984" calcext:value-type="float">
            <text:p>49056.1</text:p>
          </table:table-cell>
          <table:table-cell table:style-name="ce57" table:formula="of:=MULTIPLE.OPERATIONS([.D$56];[.$C$8];[.$B61])" office:value-type="percentage" office:value="1.06886553523736" calcext:value-type="percentage">
            <text:p>107 %</text:p>
          </table:table-cell>
          <table:table-cell table:style-name="ce60" office:value-type="float" office:value="49487.1628006512" calcext:value-type="float">
            <text:p>49,487</text:p>
          </table:table-cell>
          <table:table-cell table:style-name="ce57" office:value-type="percentage" office:value="1.07844570791868" calcext:value-type="percentage">
            <text:p>108 %</text:p>
          </table:table-cell>
          <table:table-cell table:number-columns-repeated="16378"/>
        </table:table-row>
        <table:table-row table:style-name="ro1">
          <table:table-cell table:style-name="ce25" table:formula="of:=+[$Resumen.C19]" office:value-type="float" office:value="7.8" calcext:value-type="float">
            <text:p>7.8</text:p>
          </table:table-cell>
          <table:table-cell table:style-name="ce33" office:value-type="percentage" office:value="0" calcext:value-type="percentage">
            <text:p>0 %</text:p>
          </table:table-cell>
          <table:table-cell table:style-name="ce47" table:formula="of:=MULTIPLE.OPERATIONS([.C$56];[.$C$8];[.$B62])" office:value-type="float" office:value="34909.5300479208" calcext:value-type="float">
            <text:p>34909.5</text:p>
          </table:table-cell>
          <table:table-cell table:style-name="ce58" table:formula="of:=MULTIPLE.OPERATIONS([.D$56];[.$C$8];[.$B62])" office:value-type="percentage" office:value="0.803590613835939" calcext:value-type="percentage">
            <text:p>80 %</text:p>
          </table:table-cell>
          <table:table-cell table:style-name="ce61" office:value-type="float" office:value="35367.5982591572" calcext:value-type="float">
            <text:p>35,368</text:p>
          </table:table-cell>
          <table:table-cell table:style-name="ce58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4" table:formula="of:=+[.$A$62]*(1+[.B63])" office:value-type="float" office:value="8.58" calcext:value-type="float">
            <text:p>8.6</text:p>
          </table:table-cell>
          <table:table-cell table:style-name="ce34" office:value-type="percentage" office:value="0.1" calcext:value-type="percentage">
            <text:p>10 %</text:p>
          </table:table-cell>
          <table:table-cell table:style-name="ce46" table:formula="of:=MULTIPLE.OPERATIONS([.C$56];[.$C$8];[.$B63])" office:value-type="float" office:value="20762.9684018575" calcext:value-type="float">
            <text:p>20763.0</text:p>
          </table:table-cell>
          <table:table-cell table:style-name="ce57" table:formula="of:=MULTIPLE.OPERATIONS([.D$56];[.$C$8];[.$B63])" office:value-type="percentage" office:value="0.550109885757199" calcext:value-type="percentage">
            <text:p>55 %</text:p>
          </table:table-cell>
          <table:table-cell table:style-name="ce60" office:value-type="float" office:value="21248.0337176632" calcext:value-type="float">
            <text:p>21,248</text:p>
          </table:table-cell>
          <table:table-cell table:style-name="ce57" office:value-type="percentage" office:value="0.559175266395029" calcext:value-type="percentage">
            <text:p>56 %</text:p>
          </table:table-cell>
          <table:table-cell table:number-columns-repeated="16378"/>
        </table:table-row>
        <table:table-row table:style-name="ro1">
          <table:table-cell table:style-name="ce24" table:formula="of:=+[.$A$62]*(1+[.B64])" office:value-type="float" office:value="9.36" calcext:value-type="float">
            <text:p>9.4</text:p>
          </table:table-cell>
          <table:table-cell table:style-name="ce32" office:value-type="percentage" office:value="0.2" calcext:value-type="percentage">
            <text:p>20 %</text:p>
          </table:table-cell>
          <table:table-cell table:style-name="ce46" table:formula="of:=MULTIPLE.OPERATIONS([.C$56];[.$C$8];[.$B64])" office:value-type="float" office:value="6616.40675579431" calcext:value-type="float">
            <text:p>6616.4</text:p>
          </table:table-cell>
          <table:table-cell table:style-name="ce57" table:formula="of:=MULTIPLE.OPERATIONS([.D$56];[.$C$8];[.$B64])" office:value-type="percentage" office:value="0.306830475811208" calcext:value-type="percentage">
            <text:p>31 %</text:p>
          </table:table-cell>
          <table:table-cell table:style-name="ce60" office:value-type="float" office:value="7128.46917616926" calcext:value-type="float">
            <text:p>7,128</text:p>
          </table:table-cell>
          <table:table-cell table:style-name="ce57" office:value-type="percentage" office:value="0.31539790932139" calcext:value-type="percentage">
            <text:p>32 %</text:p>
          </table:table-cell>
          <table:table-cell table:number-columns-repeated="16378"/>
        </table:table-row>
        <table:table-row table:style-name="ro1">
          <table:table-cell table:style-name="ce24" table:formula="of:=+[.$A$62]*(1+[.B65])" office:value-type="float" office:value="10.4530873199025" calcext:value-type="float">
            <text:p>10.5</text:p>
          </table:table-cell>
          <table:table-cell table:style-name="ce32" table:formula="of:=+[.D8]" office:value-type="percentage" office:value="0.340139399987506" calcext:value-type="percentage">
            <text:p>34 %</text:p>
          </table:table-cell>
          <table:table-cell table:style-name="ce46" table:formula="of:=MULTIPLE.OPERATIONS([.C$56];[.$C$8];[.$B65])" office:value-type="float" office:value="-13208.4998538614" calcext:value-type="float">
            <text:p>-13208.5</text:p>
          </table:table-cell>
          <table:table-cell table:style-name="ce57" table:formula="of:=MULTIPLE.OPERATIONS([.D$56];[.$C$8];[.$B65])" office:value-type="percentage" office:value="-0.0202094916706291" calcext:value-type="percentage">
            <text:p>-2 %</text:p>
          </table:table-cell>
          <table:table-cell table:style-name="ce60" office:value-type="float" office:value="-12658.6038531291" calcext:value-type="float">
            <text:p>-12,659</text:p>
          </table:table-cell>
          <table:table-cell table:style-name="ce57" office:value-type="percentage" office:value="-0.0127099741610199" calcext:value-type="percentage">
            <text:p>-1 %</text:p>
          </table:table-cell>
          <table:table-cell table:number-columns-repeated="16378"/>
        </table:table-row>
        <table:table-row table:style-name="ro1">
          <table:table-cell table:style-name="ce24" table:formula="of:=+[.$A$62]*(1+[.B66])" office:value-type="float" office:value="10.92" calcext:value-type="float">
            <text:p>10.9</text:p>
          </table:table-cell>
          <table:table-cell table:style-name="ce32" office:value-type="percentage" office:value="0.4" calcext:value-type="percentage">
            <text:p>40 %</text:p>
          </table:table-cell>
          <table:table-cell table:style-name="ce46" table:formula="of:=MULTIPLE.OPERATIONS([.C$56];[.$C$8];[.$B66])" office:value-type="float" office:value="-21676.7165363322" calcext:value-type="float">
            <text:p>-21676.7</text:p>
          </table:table-cell>
          <table:table-cell table:style-name="ce57" table:formula="of:=MULTIPLE.OPERATIONS([.D$56];[.$C$8];[.$B66])" office:value-type="percentage" office:value="-0.156108226851864" calcext:value-type="percentage">
            <text:p>-16 %</text:p>
          </table:table-cell>
          <table:table-cell table:style-name="ce60" office:value-type="float" office:value="-21110.6599068188" calcext:value-type="float">
            <text:p>-21,111</text:p>
          </table:table-cell>
          <table:table-cell table:style-name="ce57" office:value-type="percentage" office:value="-0.149233513230317" calcext:value-type="percentage">
            <text:p>-15 %</text:p>
          </table:table-cell>
          <table:table-cell table:number-columns-repeated="16378"/>
        </table:table-row>
        <table:table-row table:style-name="ro1">
          <table:table-cell table:style-name="ce24" table:formula="of:=+[.$A$62]*(1+[.B67])" office:value-type="float" office:value="11.7" calcext:value-type="float">
            <text:p>11.7</text:p>
          </table:table-cell>
          <table:table-cell table:style-name="ce35" office:value-type="percentage" office:value="0.5" calcext:value-type="percentage">
            <text:p>50 %</text:p>
          </table:table-cell>
          <table:table-cell table:style-name="ce48" table:formula="of:=MULTIPLE.OPERATIONS([.C$56];[.$C$8];[.$B67])" office:value-type="float" office:value="-35823.2781823954" calcext:value-type="float">
            <text:p>-35823.3</text:p>
          </table:table-cell>
          <table:table-cell table:style-name="ce35" table:formula="of:=MULTIPLE.OPERATIONS([.D$56];[.$C$8];[.$B67])" office:value-type="string" office:string-value="" calcext:value-type="error">
            <text:p>Err:523</text:p>
          </table:table-cell>
          <table:table-cell table:style-name="ce62" office:value-type="float" office:value="-35230.2244483128" calcext:value-type="float">
            <text:p>-35,230</text:p>
          </table:table-cell>
          <table:table-cell table:style-name="ce35" office:value-type="percentage" office:value="-0.37424592211517" calcext:value-type="percentage">
            <text:p>-37 %</text:p>
          </table:table-cell>
          <table:table-cell table:number-columns-repeated="16378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bable" table:style-name="ta3">
        <table:scenario table:display-border="false" table:border-color="#c0c0c0" table:copy-back="false" table:copy-styles="false" table:copy-formulas="false" table:protected="true" table:is-active="false" table:scenario-ranges="Probable.C2:Probable.C3 Probable.C8:Probable.C8" table:comment="Cre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simista" table:style-name="ta3">
        <table:scenario table:display-border="false" table:border-color="#c0c0c0" table:copy-back="false" table:copy-styles="false" table:copy-formulas="false" table:protected="true" table:is-active="false" table:scenario-ranges="Pesimista.C2:Pesimista.C3 Pesimista.C8:Pesimista.C8" table:comment="Creado por ASUS el 01/03/2021&#10;Modific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-0.3" calcext:value-type="percentage">
            <text:p>-30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-0.4" calcext:value-type="percentage">
            <text:p>-40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0.25" calcext:value-type="percentage">
            <text:p>25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timista" table:style-name="ta3">
        <table:scenario table:display-border="false" table:border-color="#c0c0c0" table:copy-back="false" table:copy-styles="false" table:copy-formulas="false" table:protected="true" table:is-active="false" table:scenario-ranges="Optimista.C2:Optimista.C3 Optimista.C8:Optimista.C8" table:comment="Cre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0.22" calcext:value-type="percentage">
            <text:p>22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0.21" calcext:value-type="percentage">
            <text:p>21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-0.2" calcext:value-type="percentage">
            <text:p>-20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en" table:style-name="ta4">
        <table:table-column table:style-name="co4" table:default-cell-style-name="ce16"/>
        <table:table-column table:style-name="co5" table:default-cell-style-name="ce16"/>
        <table:table-column table:style-name="co8" table:default-cell-style-name="ce16"/>
        <table:table-column table:style-name="co4" table:number-columns-repeated="3" table:default-cell-style-name="ce16"/>
        <table:table-column table:style-name="co7" table:number-columns-repeated="4" table:default-cell-style-name="ce16"/>
        <table:table-column table:style-name="co4" table:number-columns-repeated="16374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RESUMEN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17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>
            <text:p>TC dólar fin de año</text:p>
          </table:table-cell>
          <table:table-cell table:style-name="ce22" office:value-type="float" office:value="3.7" calcext:value-type="float">
            <text:p>3.7</text:p>
          </table:table-cell>
          <table:table-cell office:value-type="string" calcext:value-type="string">
            <text:p>soles/dólar</text:p>
          </table:table-cell>
          <table:table-cell table:number-columns-repeated="16380"/>
        </table:table-row>
        <table:table-row table:style-name="ro1">
          <table:table-cell/>
          <table:table-cell table:style-name="ce22" office:value-type="string" calcext:value-type="string">
            <text:p>Devaluación del dólar</text:p>
          </table:table-cell>
          <table:table-cell table:style-name="ce78" table:formula="of:=([.C5]-[.C20])/[.C20]" office:value-type="percentage" office:value="0.0277777777777778" calcext:value-type="percentage">
            <text:p>2.78 %</text:p>
          </table:table-cell>
          <table:table-cell table:number-columns-repeated="3"/>
          <table:table-cell table:style-name="ce77" office:value-type="string" calcext:value-type="string">
            <text:p>VANE</text:p>
          </table:table-cell>
          <table:table-cell table:style-name="ce77" office:value-type="string" calcext:value-type="string">
            <text:p>TIRE</text:p>
          </table:table-cell>
          <table:table-cell table:style-name="ce77" office:value-type="string" calcext:value-type="string">
            <text:p>VANF</text:p>
          </table:table-cell>
          <table:table-cell table:style-name="ce77" office:value-type="string" calcext:value-type="string">
            <text:p>TIRF</text:p>
          </table:table-cell>
          <table:table-cell table:number-columns-repeated="16374"/>
        </table:table-row>
        <table:table-row table:style-name="ro1">
          <table:table-cell/>
          <table:table-cell table:style-name="ce22" office:value-type="string" calcext:value-type="string">
            <text:p>Inflacion USA</text:p>
          </table:table-cell>
          <table:table-cell table:style-name="ce79" office:value-type="percentage" office:value="0.02" calcext:value-type="percentage">
            <text:p>2 %</text:p>
          </table:table-cell>
          <table:table-cell office:value-type="string" calcext:value-type="string">
            <text:p>nominal anual</text:p>
          </table:table-cell>
          <table:table-cell table:number-columns-repeated="2"/>
          <table:table-cell table:style-name="ce66" table:formula="of:=+[$Rentabilidad.D12]" office:value-type="float" office:value="34909.5300479208" calcext:value-type="float">
            <text:p>34,909.53</text:p>
          </table:table-cell>
          <table:table-cell table:style-name="ce68" table:formula="of:=+[$Rentabilidad.D14]" office:value-type="percentage" office:value="0.803590613835939" calcext:value-type="percentage">
            <text:p>80.36 %</text:p>
          </table:table-cell>
          <table:table-cell table:style-name="ce66" table:formula="of:=+[$Rentabilidad.D25]" office:value-type="float" office:value="35367.5982591573" calcext:value-type="float">
            <text:p>35,367.60</text:p>
          </table:table-cell>
          <table:table-cell table:style-name="ce86" table:formula="of:=+[$Rentabilidad.D27]" office:value-type="percentage" office:value="0.812983685869219" calcext:value-type="percentage">
            <text:p>81 %</text:p>
          </table:table-cell>
          <table:table-cell table:number-columns-repeated="16374"/>
        </table:table-row>
        <table:table-row table:style-name="ro1">
          <table:table-cell/>
          <table:table-cell table:style-name="ce22" office:value-type="string" calcext:value-type="string">
            <text:p>Inflacion Peru</text:p>
          </table:table-cell>
          <table:table-cell table:style-name="ce80" office:value-type="percentage" office:value="0.029" calcext:value-type="percentage">
            <text:p>2.9%</text:p>
          </table:table-cell>
          <table:table-cell office:value-type="string" calcext:value-type="string">
            <text:p><text:s/>nominal anual</text:p>
          </table:table-cell>
          <table:table-cell table:number-columns-repeated="16380"/>
        </table:table-row>
        <table:table-row table:style-name="ro1">
          <table:table-cell/>
          <table:table-cell table:style-name="ce22" office:value-type="string" calcext:value-type="string">
            <text:p>Horizonte Evaluación</text:p>
          </table:table-cell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años</text:p>
          </table:table-cell>
          <table:table-cell table:number-columns-repeated="7"/>
          <table:table-cell table:style-name="ce15" office:value-type="percentage" office:value="-0.31" calcext:value-type="percentage">
            <text:p>-31 %</text:p>
          </table:table-cell>
          <table:table-cell table:style-name="ce15" office:value-type="percentage" office:value="0.22" calcext:value-type="percentage">
            <text:p>22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TEA nominal</text:p>
          </table:table-cell>
          <table:table-cell table:style-name="ce79" office:value-type="percentage" office:value="0.174" calcext:value-type="percentage">
            <text:p>17 %</text:p>
          </table:table-cell>
          <table:table-cell office:value-type="string" calcext:value-type="string">
            <text:p>Dólares</text:p>
          </table:table-cell>
          <table:table-cell table:number-columns-repeated="7"/>
          <table:table-cell table:style-name="ce15" office:value-type="percentage" office:value="-0.42" calcext:value-type="percentage">
            <text:p>-42 %</text:p>
          </table:table-cell>
          <table:table-cell table:style-name="ce15" office:value-type="percentage" office:value="0.21" calcext:value-type="percentage">
            <text:p>21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Impuesto I</text:p>
          </table:table-cell>
          <table:table-cell table:style-name="ce79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 table:formula="of:=66000/[.C20]" office:value-type="float" office:value="18333.3333333333" calcext:value-type="float">
            <text:p>18333.3333333333</text:p>
          </table:table-cell>
          <table:table-cell table:number-columns-repeated="6"/>
          <table:table-cell table:style-name="ce15" office:value-type="percentage" office:value="0.28" calcext:value-type="percentage">
            <text:p>28 %</text:p>
          </table:table-cell>
          <table:table-cell table:style-name="ce15" office:value-type="percentage" office:value="-0.2" calcext:value-type="percentage">
            <text:p>-20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Impuesto II</text:p>
          </table:table-cell>
          <table:table-cell table:style-name="ce79" office:value-type="percentage" office:value="0.295" calcext:value-type="percentage">
            <text:p>30 %</text:p>
          </table:table-cell>
          <table:table-cell office:value-type="string" calcext:value-type="string">
            <text:p>Mayor a 66,000</text:p>
          </table:table-cell>
          <table:table-cell table:number-columns-repeated="16380"/>
        </table:table-row>
        <table:table-row table:style-name="ro1">
          <table:table-cell/>
          <table:table-cell table:style-name="ce77" office:value-type="string" calcext:value-type="string">
            <text:p>Valor de venta A</text:p>
          </table:table-cell>
          <table:table-cell table:style-name="ce82" table:formula="of:=141.536960345679*(1+[$'Análisis de sensibilidad'.C2])" office:value-type="float" office:value="141.536960345679" calcext:value-type="float">
            <text:p>141.54</text:p>
          </table:table-cell>
          <table:table-cell table:style-name="ce85" table:number-columns-repeated="2"/>
          <table:table-cell/>
          <table:table-cell table:style-name="ce67"/>
          <table:table-cell table:style-name="ce69"/>
          <table:table-cell table:style-name="ce70"/>
          <table:table-cell table:style-name="ce7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Valor de venta B</text:p>
          </table:table-cell>
          <table:table-cell table:style-name="ce82" table:formula="of:=111.129227012346*(1+[$'Análisis de sensibilidad'.C3])" office:value-type="float" office:value="111.129227012346" calcext:value-type="float">
            <text:p>111.13</text:p>
          </table:table-cell>
          <table:table-cell table:style-name="ce85" table:number-columns-repeated="2"/>
          <table:table-cell/>
          <table:table-cell table:style-name="ce67"/>
          <table:table-cell table:style-name="ce70" table:number-columns-repeated="2"/>
          <table:table-cell table:style-name="ce7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Valor de venta C</text:p>
          </table:table-cell>
          <table:table-cell table:style-name="ce82" table:formula="of:=100.527627012346*(1+[$'Análisis de sensibilidad'.C4])" office:value-type="float" office:value="100.527627012346" calcext:value-type="float">
            <text:p>100.53</text:p>
          </table:table-cell>
          <table:table-cell table:style-name="ce85" table:number-columns-repeated="2"/>
          <table:table-cell/>
          <table:table-cell table:style-name="ce67"/>
          <table:table-cell table:style-name="ce71" table:number-columns-repeated="2"/>
          <table:table-cell table:style-name="ce67"/>
          <table:table-cell table:style-name="ce71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Mano de Obra A</text:p>
          </table:table-cell>
          <table:table-cell table:style-name="ce83" table:formula="of:=25*(1+[$'Análisis de sensibilidad'.C5])" office:value-type="float" office:value="25" calcext:value-type="float">
            <text:p>25.0</text:p>
          </table:table-cell>
          <table:table-cell table:style-name="ce85" office:value-type="string" calcext:value-type="string">
            <text:p>Costo unit.modelo</text:p>
          </table:table-cell>
          <table:table-cell table:style-name="ce85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Mano de Obra B</text:p>
          </table:table-cell>
          <table:table-cell table:style-name="ce83" table:formula="of:=22.2222222222222*(1+[$'Análisis de sensibilidad'.C6])" office:value-type="float" office:value="22.2222222222222" calcext:value-type="float">
            <text:p>22.2</text:p>
          </table:table-cell>
          <table:table-cell table:style-name="ce85" table:number-columns-repeated="2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Mano de Obra C</text:p>
          </table:table-cell>
          <table:table-cell table:style-name="ce83" table:formula="of:=18.0555555555556*(1+[$'Análisis de sensibilidad'.C7])" office:value-type="float" office:value="18.0555555555556" calcext:value-type="float">
            <text:p>18.1</text:p>
          </table:table-cell>
          <table:table-cell table:style-name="ce85" table:number-columns-repeated="2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Valor hilado de alpaca</text:p>
          </table:table-cell>
          <table:table-cell table:style-name="ce84" table:formula="of:=7.8*(1+[$'Análisis de sensibilidad'.C8])" office:value-type="float" office:value="7.8" calcext:value-type="float">
            <text:p>7.8</text:p>
          </table:table-cell>
          <table:table-cell table:style-name="ce85" office:value-type="string" calcext:value-type="string">
            <text:p>por 100 gramos</text:p>
          </table:table-cell>
          <table:table-cell table:style-name="ce85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Tipo de cambio Dólar</text:p>
          </table:table-cell>
          <table:table-cell table:style-name="ce81" office:value-type="float" office:value="3.6" calcext:value-type="float">
            <text:p>3.6</text:p>
          </table:table-cell>
          <table:table-cell office:value-type="string" calcext:value-type="string">
            <text:p>soles por dólar</text:p>
          </table:table-cell>
          <table:table-cell table:number-columns-repeated="1638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 de ventas" table:style-name="ta5">
        <table:table-column table:style-name="co4" table:default-cell-style-name="ce87"/>
        <table:table-column table:style-name="co1" table:number-columns-repeated="15" table:default-cell-style-name="Default"/>
        <table:table-column table:style-name="co1" table:number-columns-repeated="16368"/>
        <table:table-row table:style-name="ro1">
          <table:table-cell table:number-columns-repeated="3"/>
          <table:table-cell table:style-name="ce107"/>
          <table:table-cell table:number-columns-repeated="12"/>
        </table:table-row>
        <table:table-row table:style-name="ro4">
          <table:table-cell/>
          <table:table-cell table:style-name="ce89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98"/>
          <table:table-cell/>
        </table:table-row>
        <table:table-row table:style-name="ro5">
          <table:table-cell/>
          <table:table-cell table:style-name="ce90"/>
          <table:table-cell table:style-name="ce99" table:number-columns-repeated="13"/>
          <table:table-cell/>
        </table:table-row>
        <table:table-row table:style-name="ro1">
          <table:table-cell/>
          <table:table-cell table:style-name="ce91" office:value-type="string" calcext:value-type="string" table:number-columns-spanned="14" table:number-rows-spanned="1">
            <text:p>Proyeccion de ventas en unidades</text:p>
          </table:table-cell>
          <table:covered-table-cell table:number-columns-repeated="13" table:style-name="ce100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2" office:value-type="string" calcext:value-type="string">
            <text:p>Año</text:p>
          </table:table-cell>
          <table:table-cell table:style-name="ce92" office:value-type="string" calcext:value-type="string">
            <text:p>Mes 1</text:p>
          </table:table-cell>
          <table:table-cell table:style-name="ce92" office:value-type="string" calcext:value-type="string">
            <text:p>Mes 2</text:p>
          </table:table-cell>
          <table:table-cell table:style-name="ce92" office:value-type="string" calcext:value-type="string">
            <text:p>Mes 3</text:p>
          </table:table-cell>
          <table:table-cell table:style-name="ce92" office:value-type="string" calcext:value-type="string">
            <text:p>Mes 4</text:p>
          </table:table-cell>
          <table:table-cell table:style-name="ce92" office:value-type="string" calcext:value-type="string">
            <text:p>Mes 5</text:p>
          </table:table-cell>
          <table:table-cell table:style-name="ce92" office:value-type="string" calcext:value-type="string">
            <text:p>Mes 6</text:p>
          </table:table-cell>
          <table:table-cell table:style-name="ce92" office:value-type="string" calcext:value-type="string">
            <text:p>Mes 7</text:p>
          </table:table-cell>
          <table:table-cell table:style-name="ce92" office:value-type="string" calcext:value-type="string">
            <text:p>Mes 8</text:p>
          </table:table-cell>
          <table:table-cell table:style-name="ce92" office:value-type="string" calcext:value-type="string">
            <text:p>Mes 9</text:p>
          </table:table-cell>
          <table:table-cell table:style-name="ce92" office:value-type="string" calcext:value-type="string">
            <text:p>Mes 10</text:p>
          </table:table-cell>
          <table:table-cell table:style-name="ce92" office:value-type="string" calcext:value-type="string">
            <text:p>Mes 11</text:p>
          </table:table-cell>
          <table:table-cell table:style-name="ce92" office:value-type="string" calcext:value-type="string">
            <text:p>Mes 12</text:p>
          </table:table-cell>
          <table:table-cell table:style-name="ce9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1" table:formula="of:=SUM([.C8:.C10])" office:value-type="float" office:value="150" calcext:value-type="float">
            <text:p>150</text:p>
          </table:table-cell>
          <table:table-cell table:style-name="ce101" table:formula="of:=SUM([.D8:.D10])" office:value-type="float" office:value="150" calcext:value-type="float">
            <text:p>150</text:p>
          </table:table-cell>
          <table:table-cell table:style-name="ce101" table:formula="of:=SUM([.E8:.E10])" office:value-type="float" office:value="150" calcext:value-type="float">
            <text:p>150</text:p>
          </table:table-cell>
          <table:table-cell table:style-name="ce101" table:formula="of:=SUM([.F8:.F10])" office:value-type="float" office:value="150" calcext:value-type="float">
            <text:p>150</text:p>
          </table:table-cell>
          <table:table-cell table:style-name="ce101" table:formula="of:=SUM([.G8:.G10])" office:value-type="float" office:value="150" calcext:value-type="float">
            <text:p>150</text:p>
          </table:table-cell>
          <table:table-cell table:style-name="ce101" table:formula="of:=SUM([.H8:.H10])" office:value-type="float" office:value="150" calcext:value-type="float">
            <text:p>150</text:p>
          </table:table-cell>
          <table:table-cell table:style-name="ce101" table:formula="of:=SUM([.I8:.I10])" office:value-type="float" office:value="150" calcext:value-type="float">
            <text:p>150</text:p>
          </table:table-cell>
          <table:table-cell table:style-name="ce101" table:formula="of:=SUM([.J8:.J10])" office:value-type="float" office:value="150" calcext:value-type="float">
            <text:p>150</text:p>
          </table:table-cell>
          <table:table-cell table:style-name="ce101" table:formula="of:=SUM([.K8:.K10])" office:value-type="float" office:value="150" calcext:value-type="float">
            <text:p>150</text:p>
          </table:table-cell>
          <table:table-cell table:style-name="ce101" table:formula="of:=SUM([.L8:.L10])" office:value-type="float" office:value="150" calcext:value-type="float">
            <text:p>150</text:p>
          </table:table-cell>
          <table:table-cell table:style-name="ce101" table:formula="of:=SUM([.M8:.M10])" office:value-type="float" office:value="150" calcext:value-type="float">
            <text:p>150</text:p>
          </table:table-cell>
          <table:table-cell table:style-name="ce101" table:formula="of:=SUM([.N8:.N10])" office:value-type="float" office:value="150" calcext:value-type="float">
            <text:p>150</text:p>
          </table:table-cell>
          <table:table-cell table:style-name="ce109" table:formula="of:=SUM([.C7:.N7])" office:value-type="float" office:value="1800" calcext:value-type="float">
            <text:p>1,8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8:.N8])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9:.N9])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10:.N10])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88" office:value-type="percentage" office:value="0.03" calcext:value-type="percentage">
            <text:p>3 %</text:p>
          </table:table-cell>
          <table:table-cell table:style-name="ce93" office:value-type="float" office:value="2" calcext:value-type="float">
            <text:p>2</text:p>
          </table:table-cell>
          <table:table-cell table:style-name="ce103" table:formula="of:=SUM([.C12:.C14])" office:value-type="float" office:value="155" calcext:value-type="float">
            <text:p>155</text:p>
          </table:table-cell>
          <table:table-cell table:style-name="ce103" table:formula="of:=SUM([.D12:.D14])" office:value-type="float" office:value="155" calcext:value-type="float">
            <text:p>155</text:p>
          </table:table-cell>
          <table:table-cell table:style-name="ce103" table:formula="of:=SUM([.E12:.E14])" office:value-type="float" office:value="155" calcext:value-type="float">
            <text:p>155</text:p>
          </table:table-cell>
          <table:table-cell table:style-name="ce103" table:formula="of:=SUM([.F12:.F14])" office:value-type="float" office:value="155" calcext:value-type="float">
            <text:p>155</text:p>
          </table:table-cell>
          <table:table-cell table:style-name="ce103" table:formula="of:=SUM([.G12:.G14])" office:value-type="float" office:value="155" calcext:value-type="float">
            <text:p>155</text:p>
          </table:table-cell>
          <table:table-cell table:style-name="ce103" table:formula="of:=SUM([.H12:.H14])" office:value-type="float" office:value="155" calcext:value-type="float">
            <text:p>155</text:p>
          </table:table-cell>
          <table:table-cell table:style-name="ce103" table:formula="of:=SUM([.I12:.I14])" office:value-type="float" office:value="155" calcext:value-type="float">
            <text:p>155</text:p>
          </table:table-cell>
          <table:table-cell table:style-name="ce103" table:formula="of:=SUM([.J12:.J14])" office:value-type="float" office:value="155" calcext:value-type="float">
            <text:p>155</text:p>
          </table:table-cell>
          <table:table-cell table:style-name="ce103" table:formula="of:=SUM([.K12:.K14])" office:value-type="float" office:value="155" calcext:value-type="float">
            <text:p>155</text:p>
          </table:table-cell>
          <table:table-cell table:style-name="ce103" table:formula="of:=SUM([.L12:.L14])" office:value-type="float" office:value="155" calcext:value-type="float">
            <text:p>155</text:p>
          </table:table-cell>
          <table:table-cell table:style-name="ce103" table:formula="of:=SUM([.M12:.M14])" office:value-type="float" office:value="155" calcext:value-type="float">
            <text:p>155</text:p>
          </table:table-cell>
          <table:table-cell table:style-name="ce103" table:formula="of:=SUM([.N12:.N14])" office:value-type="float" office:value="155" calcext:value-type="float">
            <text:p>155</text:p>
          </table:table-cell>
          <table:table-cell table:style-name="ce109" table:formula="of:=SUM([.C11:.N11])" office:value-type="float" office:value="1860" calcext:value-type="float">
            <text:p>1,86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2" calcext:value-type="float">
            <text:p>52</text:p>
          </table:table-cell>
          <table:table-cell table:style-name="ce110" table:formula="of:=SUM([.C12:.N12])" office:value-type="float" office:value="624" calcext:value-type="float">
            <text:p>624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2" calcext:value-type="float">
            <text:p>52</text:p>
          </table:table-cell>
          <table:table-cell table:style-name="ce110" table:formula="of:=SUM([.C13:.N13])" office:value-type="float" office:value="624" calcext:value-type="float">
            <text:p>624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1" calcext:value-type="float">
            <text:p>51</text:p>
          </table:table-cell>
          <table:table-cell table:style-name="ce110" table:formula="of:=SUM([.C14:.N14])" office:value-type="float" office:value="612" calcext:value-type="float">
            <text:p>612</text:p>
          </table:table-cell>
          <table:table-cell/>
        </table:table-row>
        <table:table-row table:style-name="ro1">
          <table:table-cell table:style-name="ce88" office:value-type="percentage" office:value="0.05" calcext:value-type="percentage">
            <text:p>5 %</text:p>
          </table:table-cell>
          <table:table-cell table:style-name="ce93" office:value-type="float" office:value="3" calcext:value-type="float">
            <text:p>3</text:p>
          </table:table-cell>
          <table:table-cell table:style-name="ce103" table:formula="of:=SUM([.C16:.C18])" office:value-type="float" office:value="163" calcext:value-type="float">
            <text:p>163</text:p>
          </table:table-cell>
          <table:table-cell table:style-name="ce103" table:formula="of:=SUM([.D16:.D18])" office:value-type="float" office:value="163" calcext:value-type="float">
            <text:p>163</text:p>
          </table:table-cell>
          <table:table-cell table:style-name="ce103" table:formula="of:=SUM([.E16:.E18])" office:value-type="float" office:value="163" calcext:value-type="float">
            <text:p>163</text:p>
          </table:table-cell>
          <table:table-cell table:style-name="ce103" table:formula="of:=SUM([.F16:.F18])" office:value-type="float" office:value="163" calcext:value-type="float">
            <text:p>163</text:p>
          </table:table-cell>
          <table:table-cell table:style-name="ce103" table:formula="of:=SUM([.G16:.G18])" office:value-type="float" office:value="163" calcext:value-type="float">
            <text:p>163</text:p>
          </table:table-cell>
          <table:table-cell table:style-name="ce103" table:formula="of:=SUM([.H16:.H18])" office:value-type="float" office:value="163" calcext:value-type="float">
            <text:p>163</text:p>
          </table:table-cell>
          <table:table-cell table:style-name="ce103" table:formula="of:=SUM([.I16:.I18])" office:value-type="float" office:value="163" calcext:value-type="float">
            <text:p>163</text:p>
          </table:table-cell>
          <table:table-cell table:style-name="ce103" table:formula="of:=SUM([.J16:.J18])" office:value-type="float" office:value="163" calcext:value-type="float">
            <text:p>163</text:p>
          </table:table-cell>
          <table:table-cell table:style-name="ce103" table:formula="of:=SUM([.K16:.K18])" office:value-type="float" office:value="163" calcext:value-type="float">
            <text:p>163</text:p>
          </table:table-cell>
          <table:table-cell table:style-name="ce103" table:formula="of:=SUM([.L16:.L18])" office:value-type="float" office:value="163" calcext:value-type="float">
            <text:p>163</text:p>
          </table:table-cell>
          <table:table-cell table:style-name="ce103" table:formula="of:=SUM([.M16:.M18])" office:value-type="float" office:value="163" calcext:value-type="float">
            <text:p>163</text:p>
          </table:table-cell>
          <table:table-cell table:style-name="ce103" table:formula="of:=SUM([.N16:.N18])" office:value-type="float" office:value="163" calcext:value-type="float">
            <text:p>163</text:p>
          </table:table-cell>
          <table:table-cell table:style-name="ce109" table:formula="of:=SUM([.C15:.N15])" office:value-type="float" office:value="1956" calcext:value-type="float">
            <text:p>1,956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4" calcext:value-type="float">
            <text:p>54</text:p>
          </table:table-cell>
          <table:table-cell table:style-name="ce110" table:formula="of:=SUM([.C16:.N16])" office:value-type="float" office:value="648" calcext:value-type="float">
            <text:p>648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5" calcext:value-type="float">
            <text:p>55</text:p>
          </table:table-cell>
          <table:table-cell table:style-name="ce110" table:formula="of:=SUM([.C17:.N17])" office:value-type="float" office:value="660" calcext:value-type="float">
            <text:p>66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4" calcext:value-type="float">
            <text:p>54</text:p>
          </table:table-cell>
          <table:table-cell table:style-name="ce110" table:formula="of:=SUM([.C18:.N18])" office:value-type="float" office:value="648" calcext:value-type="float">
            <text:p>64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98"/>
        </table:table-row>
        <table:table-row table:style-name="ro1">
          <table:table-cell/>
          <table:table-cell table:style-name="ce90"/>
          <table:table-cell table:style-name="ce99" table:number-columns-repeated="13"/>
          <table:table-cell table:style-name="ce90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Proyeccion de ventas reales en dólares</text:p>
          </table:table-cell>
          <table:covered-table-cell table:number-columns-repeated="14" table:style-name="ce98"/>
        </table:table-row>
        <table:table-row table:style-name="ro6">
          <table:table-cell/>
          <table:table-cell table:style-name="ce95" office:value-type="string" calcext:value-type="string">
            <text:p>Año</text:p>
          </table:table-cell>
          <table:table-cell table:style-name="ce104" office:value-type="string" calcext:value-type="string">
            <text:p>Valor Unitario</text:p>
          </table:table-cell>
          <table:table-cell table:style-name="ce104" office:value-type="string" calcext:value-type="string">
            <text:p>Mes 1</text:p>
          </table:table-cell>
          <table:table-cell table:style-name="ce104" office:value-type="string" calcext:value-type="string">
            <text:p>Mes 2</text:p>
          </table:table-cell>
          <table:table-cell table:style-name="ce104" office:value-type="string" calcext:value-type="string">
            <text:p>Mes 3</text:p>
          </table:table-cell>
          <table:table-cell table:style-name="ce104" office:value-type="string" calcext:value-type="string">
            <text:p>Mes 4</text:p>
          </table:table-cell>
          <table:table-cell table:style-name="ce104" office:value-type="string" calcext:value-type="string">
            <text:p>Mes 5</text:p>
          </table:table-cell>
          <table:table-cell table:style-name="ce104" office:value-type="string" calcext:value-type="string">
            <text:p>Mes 6</text:p>
          </table:table-cell>
          <table:table-cell table:style-name="ce104" office:value-type="string" calcext:value-type="string">
            <text:p>Mes 7</text:p>
          </table:table-cell>
          <table:table-cell table:style-name="ce104" office:value-type="string" calcext:value-type="string">
            <text:p>Mes 8</text:p>
          </table:table-cell>
          <table:table-cell table:style-name="ce104" office:value-type="string" calcext:value-type="string">
            <text:p>Mes 9</text:p>
          </table:table-cell>
          <table:table-cell table:style-name="ce104" office:value-type="string" calcext:value-type="string">
            <text:p>Mes 10</text:p>
          </table:table-cell>
          <table:table-cell table:style-name="ce104" office:value-type="string" calcext:value-type="string">
            <text:p>Mes 11</text:p>
          </table:table-cell>
          <table:table-cell table:style-name="ce104" office:value-type="string" calcext:value-type="string">
            <text:p>Mes 12</text:p>
          </table:table-cell>
          <table:table-cell table:style-name="ce111" office:value-type="string" calcext:value-type="string">
            <text:p>TOTAL</text:p>
          </table:table-cell>
        </table:table-row>
        <table:table-row table:style-name="ro1">
          <table:table-cell/>
          <table:table-cell table:style-name="ce96" office:value-type="float" office:value="1" calcext:value-type="float">
            <text:p>1</text:p>
          </table:table-cell>
          <table:table-cell table:style-name="ce105"/>
          <table:table-cell table:style-name="ce105" table:formula="of:=SUM([.D26:.D28])" office:value-type="float" office:value="17659.6907185186" calcext:value-type="float">
            <text:p>17660</text:p>
          </table:table-cell>
          <table:table-cell table:style-name="ce105" table:formula="of:=SUM([.E26:.E28])" office:value-type="float" office:value="17659.6907185186" calcext:value-type="float">
            <text:p>17660</text:p>
          </table:table-cell>
          <table:table-cell table:style-name="ce105" table:formula="of:=SUM([.F26:.F28])" office:value-type="float" office:value="17659.6907185186" calcext:value-type="float">
            <text:p>17660</text:p>
          </table:table-cell>
          <table:table-cell table:style-name="ce105" table:formula="of:=SUM([.G26:.G28])" office:value-type="float" office:value="17659.6907185186" calcext:value-type="float">
            <text:p>17660</text:p>
          </table:table-cell>
          <table:table-cell table:style-name="ce105" table:formula="of:=SUM([.H26:.H28])" office:value-type="float" office:value="17659.6907185186" calcext:value-type="float">
            <text:p>17660</text:p>
          </table:table-cell>
          <table:table-cell table:style-name="ce105" table:formula="of:=SUM([.I26:.I28])" office:value-type="float" office:value="17659.6907185186" calcext:value-type="float">
            <text:p>17660</text:p>
          </table:table-cell>
          <table:table-cell table:style-name="ce105" table:formula="of:=SUM([.J26:.J28])" office:value-type="float" office:value="17659.6907185186" calcext:value-type="float">
            <text:p>17660</text:p>
          </table:table-cell>
          <table:table-cell table:style-name="ce105" table:formula="of:=SUM([.K26:.K28])" office:value-type="float" office:value="17659.6907185186" calcext:value-type="float">
            <text:p>17660</text:p>
          </table:table-cell>
          <table:table-cell table:style-name="ce105" table:formula="of:=SUM([.L26:.L28])" office:value-type="float" office:value="17659.6907185186" calcext:value-type="float">
            <text:p>17660</text:p>
          </table:table-cell>
          <table:table-cell table:style-name="ce105" table:formula="of:=SUM([.M26:.M28])" office:value-type="float" office:value="17659.6907185186" calcext:value-type="float">
            <text:p>17660</text:p>
          </table:table-cell>
          <table:table-cell table:style-name="ce105" table:formula="of:=SUM([.N26:.N28])" office:value-type="float" office:value="17659.6907185186" calcext:value-type="float">
            <text:p>17660</text:p>
          </table:table-cell>
          <table:table-cell table:style-name="ce105" table:formula="of:=SUM([.O26:.O28])" office:value-type="float" office:value="17659.6907185186" calcext:value-type="float">
            <text:p>17660</text:p>
          </table:table-cell>
          <table:table-cell table:style-name="ce105" table:formula="of:=SUM([.D25:.O25])" office:value-type="float" office:value="211916.288622223" calcext:value-type="float">
            <text:p>211916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$Resumen.C13]" office:value-type="float" office:value="141.536960345679" calcext:value-type="float">
            <text:p>141.54</text:p>
          </table:table-cell>
          <table:table-cell table:style-name="ce108" table:formula="of:=+[.$C$26]*[.C8]" office:value-type="float" office:value="7076.84801728395" calcext:value-type="float">
            <text:p>7077</text:p>
          </table:table-cell>
          <table:table-cell table:style-name="ce108" table:formula="of:=+[.$C$26]*[.D8]" office:value-type="float" office:value="7076.84801728395" calcext:value-type="float">
            <text:p>7077</text:p>
          </table:table-cell>
          <table:table-cell table:style-name="ce108" table:formula="of:=+[.$C$26]*[.E8]" office:value-type="float" office:value="7076.84801728395" calcext:value-type="float">
            <text:p>7077</text:p>
          </table:table-cell>
          <table:table-cell table:style-name="ce108" table:formula="of:=+[.$C$26]*[.F8]" office:value-type="float" office:value="7076.84801728395" calcext:value-type="float">
            <text:p>7077</text:p>
          </table:table-cell>
          <table:table-cell table:style-name="ce108" table:formula="of:=+[.$C$26]*[.G8]" office:value-type="float" office:value="7076.84801728395" calcext:value-type="float">
            <text:p>7077</text:p>
          </table:table-cell>
          <table:table-cell table:style-name="ce108" table:formula="of:=+[.$C$26]*[.H8]" office:value-type="float" office:value="7076.84801728395" calcext:value-type="float">
            <text:p>7077</text:p>
          </table:table-cell>
          <table:table-cell table:style-name="ce108" table:formula="of:=+[.$C$26]*[.I8]" office:value-type="float" office:value="7076.84801728395" calcext:value-type="float">
            <text:p>7077</text:p>
          </table:table-cell>
          <table:table-cell table:style-name="ce108" table:formula="of:=+[.$C$26]*[.J8]" office:value-type="float" office:value="7076.84801728395" calcext:value-type="float">
            <text:p>7077</text:p>
          </table:table-cell>
          <table:table-cell table:style-name="ce108" table:formula="of:=+[.$C$26]*[.K8]" office:value-type="float" office:value="7076.84801728395" calcext:value-type="float">
            <text:p>7077</text:p>
          </table:table-cell>
          <table:table-cell table:style-name="ce108" table:formula="of:=+[.$C$26]*[.L8]" office:value-type="float" office:value="7076.84801728395" calcext:value-type="float">
            <text:p>7077</text:p>
          </table:table-cell>
          <table:table-cell table:style-name="ce108" table:formula="of:=+[.$C$26]*[.M8]" office:value-type="float" office:value="7076.84801728395" calcext:value-type="float">
            <text:p>7077</text:p>
          </table:table-cell>
          <table:table-cell table:style-name="ce108" table:formula="of:=+[.$C$26]*[.N8]" office:value-type="float" office:value="7076.84801728395" calcext:value-type="float">
            <text:p>7077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$Resumen.C14]" office:value-type="float" office:value="111.129227012346" calcext:value-type="float">
            <text:p>111.13</text:p>
          </table:table-cell>
          <table:table-cell table:style-name="ce108" table:formula="of:=+[.$C$27]*[.C9]" office:value-type="float" office:value="5556.4613506173" calcext:value-type="float">
            <text:p>5556</text:p>
          </table:table-cell>
          <table:table-cell table:style-name="ce108" table:formula="of:=+[.$C$27]*[.D9]" office:value-type="float" office:value="5556.4613506173" calcext:value-type="float">
            <text:p>5556</text:p>
          </table:table-cell>
          <table:table-cell table:style-name="ce108" table:formula="of:=+[.$C$27]*[.E9]" office:value-type="float" office:value="5556.4613506173" calcext:value-type="float">
            <text:p>5556</text:p>
          </table:table-cell>
          <table:table-cell table:style-name="ce108" table:formula="of:=+[.$C$27]*[.F9]" office:value-type="float" office:value="5556.4613506173" calcext:value-type="float">
            <text:p>5556</text:p>
          </table:table-cell>
          <table:table-cell table:style-name="ce108" table:formula="of:=+[.$C$27]*[.G9]" office:value-type="float" office:value="5556.4613506173" calcext:value-type="float">
            <text:p>5556</text:p>
          </table:table-cell>
          <table:table-cell table:style-name="ce108" table:formula="of:=+[.$C$27]*[.H9]" office:value-type="float" office:value="5556.4613506173" calcext:value-type="float">
            <text:p>5556</text:p>
          </table:table-cell>
          <table:table-cell table:style-name="ce108" table:formula="of:=+[.$C$27]*[.I9]" office:value-type="float" office:value="5556.4613506173" calcext:value-type="float">
            <text:p>5556</text:p>
          </table:table-cell>
          <table:table-cell table:style-name="ce108" table:formula="of:=+[.$C$27]*[.J9]" office:value-type="float" office:value="5556.4613506173" calcext:value-type="float">
            <text:p>5556</text:p>
          </table:table-cell>
          <table:table-cell table:style-name="ce108" table:formula="of:=+[.$C$27]*[.K9]" office:value-type="float" office:value="5556.4613506173" calcext:value-type="float">
            <text:p>5556</text:p>
          </table:table-cell>
          <table:table-cell table:style-name="ce108" table:formula="of:=+[.$C$27]*[.L9]" office:value-type="float" office:value="5556.4613506173" calcext:value-type="float">
            <text:p>5556</text:p>
          </table:table-cell>
          <table:table-cell table:style-name="ce108" table:formula="of:=+[.$C$27]*[.M9]" office:value-type="float" office:value="5556.4613506173" calcext:value-type="float">
            <text:p>5556</text:p>
          </table:table-cell>
          <table:table-cell table:style-name="ce108" table:formula="of:=+[.$C$27]*[.N9]" office:value-type="float" office:value="5556.4613506173" calcext:value-type="float">
            <text:p>5556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$Resumen.C15]" office:value-type="float" office:value="100.527627012346" calcext:value-type="float">
            <text:p>100.53</text:p>
          </table:table-cell>
          <table:table-cell table:style-name="ce108" table:formula="of:=+[.$C$28]*[.C10]" office:value-type="float" office:value="5026.3813506173" calcext:value-type="float">
            <text:p>5026</text:p>
          </table:table-cell>
          <table:table-cell table:style-name="ce108" table:formula="of:=+[.$C$28]*[.D10]" office:value-type="float" office:value="5026.3813506173" calcext:value-type="float">
            <text:p>5026</text:p>
          </table:table-cell>
          <table:table-cell table:style-name="ce108" table:formula="of:=+[.$C$28]*[.E10]" office:value-type="float" office:value="5026.3813506173" calcext:value-type="float">
            <text:p>5026</text:p>
          </table:table-cell>
          <table:table-cell table:style-name="ce108" table:formula="of:=+[.$C$28]*[.F10]" office:value-type="float" office:value="5026.3813506173" calcext:value-type="float">
            <text:p>5026</text:p>
          </table:table-cell>
          <table:table-cell table:style-name="ce108" table:formula="of:=+[.$C$28]*[.G10]" office:value-type="float" office:value="5026.3813506173" calcext:value-type="float">
            <text:p>5026</text:p>
          </table:table-cell>
          <table:table-cell table:style-name="ce108" table:formula="of:=+[.$C$28]*[.H10]" office:value-type="float" office:value="5026.3813506173" calcext:value-type="float">
            <text:p>5026</text:p>
          </table:table-cell>
          <table:table-cell table:style-name="ce108" table:formula="of:=+[.$C$28]*[.I10]" office:value-type="float" office:value="5026.3813506173" calcext:value-type="float">
            <text:p>5026</text:p>
          </table:table-cell>
          <table:table-cell table:style-name="ce108" table:formula="of:=+[.$C$28]*[.J10]" office:value-type="float" office:value="5026.3813506173" calcext:value-type="float">
            <text:p>5026</text:p>
          </table:table-cell>
          <table:table-cell table:style-name="ce108" table:formula="of:=+[.$C$28]*[.K10]" office:value-type="float" office:value="5026.3813506173" calcext:value-type="float">
            <text:p>5026</text:p>
          </table:table-cell>
          <table:table-cell table:style-name="ce108" table:formula="of:=+[.$C$28]*[.L10]" office:value-type="float" office:value="5026.3813506173" calcext:value-type="float">
            <text:p>5026</text:p>
          </table:table-cell>
          <table:table-cell table:style-name="ce108" table:formula="of:=+[.$C$28]*[.M10]" office:value-type="float" office:value="5026.3813506173" calcext:value-type="float">
            <text:p>5026</text:p>
          </table:table-cell>
          <table:table-cell table:style-name="ce108" table:formula="of:=+[.$C$28]*[.N10]" office:value-type="float" office:value="5026.3813506173" calcext:value-type="float">
            <text:p>5026</text:p>
          </table:table-cell>
          <table:table-cell table:style-name="ce108"/>
        </table:table-row>
        <table:table-row table:style-name="ro1">
          <table:table-cell/>
          <table:table-cell table:style-name="ce96" office:value-type="float" office:value="2" calcext:value-type="float">
            <text:p>2</text:p>
          </table:table-cell>
          <table:table-cell table:style-name="ce105"/>
          <table:table-cell table:style-name="ce105" table:formula="of:=SUM([.D30:.D32])" office:value-type="float" office:value="18265.5507202469" calcext:value-type="float">
            <text:p>18266</text:p>
          </table:table-cell>
          <table:table-cell table:style-name="ce105" table:formula="of:=SUM([.E30:.E32])" office:value-type="float" office:value="18265.5507202469" calcext:value-type="float">
            <text:p>18266</text:p>
          </table:table-cell>
          <table:table-cell table:style-name="ce105" table:formula="of:=SUM([.F30:.F32])" office:value-type="float" office:value="18265.5507202469" calcext:value-type="float">
            <text:p>18266</text:p>
          </table:table-cell>
          <table:table-cell table:style-name="ce105" table:formula="of:=SUM([.G30:.G32])" office:value-type="float" office:value="18265.5507202469" calcext:value-type="float">
            <text:p>18266</text:p>
          </table:table-cell>
          <table:table-cell table:style-name="ce105" table:formula="of:=SUM([.H30:.H32])" office:value-type="float" office:value="18265.5507202469" calcext:value-type="float">
            <text:p>18266</text:p>
          </table:table-cell>
          <table:table-cell table:style-name="ce105" table:formula="of:=SUM([.I30:.I32])" office:value-type="float" office:value="18265.5507202469" calcext:value-type="float">
            <text:p>18266</text:p>
          </table:table-cell>
          <table:table-cell table:style-name="ce105" table:formula="of:=SUM([.J30:.J32])" office:value-type="float" office:value="18265.5507202469" calcext:value-type="float">
            <text:p>18266</text:p>
          </table:table-cell>
          <table:table-cell table:style-name="ce105" table:formula="of:=SUM([.K30:.K32])" office:value-type="float" office:value="18265.5507202469" calcext:value-type="float">
            <text:p>18266</text:p>
          </table:table-cell>
          <table:table-cell table:style-name="ce105" table:formula="of:=SUM([.L30:.L32])" office:value-type="float" office:value="18265.5507202469" calcext:value-type="float">
            <text:p>18266</text:p>
          </table:table-cell>
          <table:table-cell table:style-name="ce105" table:formula="of:=SUM([.M30:.M32])" office:value-type="float" office:value="18265.5507202469" calcext:value-type="float">
            <text:p>18266</text:p>
          </table:table-cell>
          <table:table-cell table:style-name="ce105" table:formula="of:=SUM([.N30:.N32])" office:value-type="float" office:value="18265.5507202469" calcext:value-type="float">
            <text:p>18266</text:p>
          </table:table-cell>
          <table:table-cell table:style-name="ce105" table:formula="of:=SUM([.O30:.O32])" office:value-type="float" office:value="18265.5507202469" calcext:value-type="float">
            <text:p>18266</text:p>
          </table:table-cell>
          <table:table-cell table:style-name="ce105" table:formula="of:=SUM([.D29:.O29])" office:value-type="float" office:value="219186.608642963" calcext:value-type="float">
            <text:p>219187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.C26]" office:value-type="float" office:value="141.536960345679" calcext:value-type="float">
            <text:p>141.54</text:p>
          </table:table-cell>
          <table:table-cell table:style-name="ce108" table:formula="of:=+[.$C$30]*[.C12]" office:value-type="float" office:value="7359.92193797531" calcext:value-type="float">
            <text:p>7360</text:p>
          </table:table-cell>
          <table:table-cell table:style-name="ce108" table:formula="of:=+[.$C$30]*[.D12]" office:value-type="float" office:value="7359.92193797531" calcext:value-type="float">
            <text:p>7360</text:p>
          </table:table-cell>
          <table:table-cell table:style-name="ce108" table:formula="of:=+[.$C$30]*[.E12]" office:value-type="float" office:value="7359.92193797531" calcext:value-type="float">
            <text:p>7360</text:p>
          </table:table-cell>
          <table:table-cell table:style-name="ce108" table:formula="of:=+[.$C$30]*[.F12]" office:value-type="float" office:value="7359.92193797531" calcext:value-type="float">
            <text:p>7360</text:p>
          </table:table-cell>
          <table:table-cell table:style-name="ce108" table:formula="of:=+[.$C$30]*[.G12]" office:value-type="float" office:value="7359.92193797531" calcext:value-type="float">
            <text:p>7360</text:p>
          </table:table-cell>
          <table:table-cell table:style-name="ce108" table:formula="of:=+[.$C$30]*[.H12]" office:value-type="float" office:value="7359.92193797531" calcext:value-type="float">
            <text:p>7360</text:p>
          </table:table-cell>
          <table:table-cell table:style-name="ce108" table:formula="of:=+[.$C$30]*[.I12]" office:value-type="float" office:value="7359.92193797531" calcext:value-type="float">
            <text:p>7360</text:p>
          </table:table-cell>
          <table:table-cell table:style-name="ce108" table:formula="of:=+[.$C$30]*[.J12]" office:value-type="float" office:value="7359.92193797531" calcext:value-type="float">
            <text:p>7360</text:p>
          </table:table-cell>
          <table:table-cell table:style-name="ce108" table:formula="of:=+[.$C$30]*[.K12]" office:value-type="float" office:value="7359.92193797531" calcext:value-type="float">
            <text:p>7360</text:p>
          </table:table-cell>
          <table:table-cell table:style-name="ce108" table:formula="of:=+[.$C$30]*[.L12]" office:value-type="float" office:value="7359.92193797531" calcext:value-type="float">
            <text:p>7360</text:p>
          </table:table-cell>
          <table:table-cell table:style-name="ce108" table:formula="of:=+[.$C$30]*[.M12]" office:value-type="float" office:value="7359.92193797531" calcext:value-type="float">
            <text:p>7360</text:p>
          </table:table-cell>
          <table:table-cell table:style-name="ce108" table:formula="of:=+[.$C$30]*[.N12]" office:value-type="float" office:value="7359.92193797531" calcext:value-type="float">
            <text:p>7360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.C27]" office:value-type="float" office:value="111.129227012346" calcext:value-type="float">
            <text:p>111.13</text:p>
          </table:table-cell>
          <table:table-cell table:style-name="ce108" table:formula="of:=+[.$C$31]*[.C13]" office:value-type="float" office:value="5778.71980464199" calcext:value-type="float">
            <text:p>5779</text:p>
          </table:table-cell>
          <table:table-cell table:style-name="ce108" table:formula="of:=+[.$C$31]*[.D13]" office:value-type="float" office:value="5778.71980464199" calcext:value-type="float">
            <text:p>5779</text:p>
          </table:table-cell>
          <table:table-cell table:style-name="ce108" table:formula="of:=+[.$C$31]*[.E13]" office:value-type="float" office:value="5778.71980464199" calcext:value-type="float">
            <text:p>5779</text:p>
          </table:table-cell>
          <table:table-cell table:style-name="ce108" table:formula="of:=+[.$C$31]*[.F13]" office:value-type="float" office:value="5778.71980464199" calcext:value-type="float">
            <text:p>5779</text:p>
          </table:table-cell>
          <table:table-cell table:style-name="ce108" table:formula="of:=+[.$C$31]*[.G13]" office:value-type="float" office:value="5778.71980464199" calcext:value-type="float">
            <text:p>5779</text:p>
          </table:table-cell>
          <table:table-cell table:style-name="ce108" table:formula="of:=+[.$C$31]*[.H13]" office:value-type="float" office:value="5778.71980464199" calcext:value-type="float">
            <text:p>5779</text:p>
          </table:table-cell>
          <table:table-cell table:style-name="ce108" table:formula="of:=+[.$C$31]*[.I13]" office:value-type="float" office:value="5778.71980464199" calcext:value-type="float">
            <text:p>5779</text:p>
          </table:table-cell>
          <table:table-cell table:style-name="ce108" table:formula="of:=+[.$C$31]*[.J13]" office:value-type="float" office:value="5778.71980464199" calcext:value-type="float">
            <text:p>5779</text:p>
          </table:table-cell>
          <table:table-cell table:style-name="ce108" table:formula="of:=+[.$C$31]*[.K13]" office:value-type="float" office:value="5778.71980464199" calcext:value-type="float">
            <text:p>5779</text:p>
          </table:table-cell>
          <table:table-cell table:style-name="ce108" table:formula="of:=+[.$C$31]*[.L13]" office:value-type="float" office:value="5778.71980464199" calcext:value-type="float">
            <text:p>5779</text:p>
          </table:table-cell>
          <table:table-cell table:style-name="ce108" table:formula="of:=+[.$C$31]*[.M13]" office:value-type="float" office:value="5778.71980464199" calcext:value-type="float">
            <text:p>5779</text:p>
          </table:table-cell>
          <table:table-cell table:style-name="ce108" table:formula="of:=+[.$C$31]*[.N13]" office:value-type="float" office:value="5778.71980464199" calcext:value-type="float">
            <text:p>5779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.C28]" office:value-type="float" office:value="100.527627012346" calcext:value-type="float">
            <text:p>100.53</text:p>
          </table:table-cell>
          <table:table-cell table:style-name="ce108" table:formula="of:=+[.$C$32]*[.C14]" office:value-type="float" office:value="5126.90897762965" calcext:value-type="float">
            <text:p>5127</text:p>
          </table:table-cell>
          <table:table-cell table:style-name="ce108" table:formula="of:=+[.$C$32]*[.D14]" office:value-type="float" office:value="5126.90897762965" calcext:value-type="float">
            <text:p>5127</text:p>
          </table:table-cell>
          <table:table-cell table:style-name="ce108" table:formula="of:=+[.$C$32]*[.E14]" office:value-type="float" office:value="5126.90897762965" calcext:value-type="float">
            <text:p>5127</text:p>
          </table:table-cell>
          <table:table-cell table:style-name="ce108" table:formula="of:=+[.$C$32]*[.F14]" office:value-type="float" office:value="5126.90897762965" calcext:value-type="float">
            <text:p>5127</text:p>
          </table:table-cell>
          <table:table-cell table:style-name="ce108" table:formula="of:=+[.$C$32]*[.G14]" office:value-type="float" office:value="5126.90897762965" calcext:value-type="float">
            <text:p>5127</text:p>
          </table:table-cell>
          <table:table-cell table:style-name="ce108" table:formula="of:=+[.$C$32]*[.H14]" office:value-type="float" office:value="5126.90897762965" calcext:value-type="float">
            <text:p>5127</text:p>
          </table:table-cell>
          <table:table-cell table:style-name="ce108" table:formula="of:=+[.$C$32]*[.I14]" office:value-type="float" office:value="5126.90897762965" calcext:value-type="float">
            <text:p>5127</text:p>
          </table:table-cell>
          <table:table-cell table:style-name="ce108" table:formula="of:=+[.$C$32]*[.J14]" office:value-type="float" office:value="5126.90897762965" calcext:value-type="float">
            <text:p>5127</text:p>
          </table:table-cell>
          <table:table-cell table:style-name="ce108" table:formula="of:=+[.$C$32]*[.K14]" office:value-type="float" office:value="5126.90897762965" calcext:value-type="float">
            <text:p>5127</text:p>
          </table:table-cell>
          <table:table-cell table:style-name="ce108" table:formula="of:=+[.$C$32]*[.L14]" office:value-type="float" office:value="5126.90897762965" calcext:value-type="float">
            <text:p>5127</text:p>
          </table:table-cell>
          <table:table-cell table:style-name="ce108" table:formula="of:=+[.$C$32]*[.M14]" office:value-type="float" office:value="5126.90897762965" calcext:value-type="float">
            <text:p>5127</text:p>
          </table:table-cell>
          <table:table-cell table:style-name="ce108" table:formula="of:=+[.$C$32]*[.N14]" office:value-type="float" office:value="5126.90897762965" calcext:value-type="float">
            <text:p>5127</text:p>
          </table:table-cell>
          <table:table-cell table:style-name="ce108"/>
        </table:table-row>
        <table:table-row table:style-name="ro1">
          <table:table-cell/>
          <table:table-cell table:style-name="ce96" office:value-type="float" office:value="3" calcext:value-type="float">
            <text:p>3</text:p>
          </table:table-cell>
          <table:table-cell table:style-name="ce105"/>
          <table:table-cell table:style-name="ce105" table:formula="of:=SUM([.D34:.D36])" office:value-type="float" office:value="19183.5952030124" calcext:value-type="float">
            <text:p>19184</text:p>
          </table:table-cell>
          <table:table-cell table:style-name="ce105" table:formula="of:=SUM([.E34:.E36])" office:value-type="float" office:value="19183.5952030124" calcext:value-type="float">
            <text:p>19184</text:p>
          </table:table-cell>
          <table:table-cell table:style-name="ce105" table:formula="of:=SUM([.F34:.F36])" office:value-type="float" office:value="19183.5952030124" calcext:value-type="float">
            <text:p>19184</text:p>
          </table:table-cell>
          <table:table-cell table:style-name="ce105" table:formula="of:=SUM([.G34:.G36])" office:value-type="float" office:value="19183.5952030124" calcext:value-type="float">
            <text:p>19184</text:p>
          </table:table-cell>
          <table:table-cell table:style-name="ce105" table:formula="of:=SUM([.H34:.H36])" office:value-type="float" office:value="19183.5952030124" calcext:value-type="float">
            <text:p>19184</text:p>
          </table:table-cell>
          <table:table-cell table:style-name="ce105" table:formula="of:=SUM([.I34:.I36])" office:value-type="float" office:value="19183.5952030124" calcext:value-type="float">
            <text:p>19184</text:p>
          </table:table-cell>
          <table:table-cell table:style-name="ce105" table:formula="of:=SUM([.J34:.J36])" office:value-type="float" office:value="19183.5952030124" calcext:value-type="float">
            <text:p>19184</text:p>
          </table:table-cell>
          <table:table-cell table:style-name="ce105" table:formula="of:=SUM([.K34:.K36])" office:value-type="float" office:value="19183.5952030124" calcext:value-type="float">
            <text:p>19184</text:p>
          </table:table-cell>
          <table:table-cell table:style-name="ce105" table:formula="of:=SUM([.L34:.L36])" office:value-type="float" office:value="19183.5952030124" calcext:value-type="float">
            <text:p>19184</text:p>
          </table:table-cell>
          <table:table-cell table:style-name="ce105" table:formula="of:=SUM([.M34:.M36])" office:value-type="float" office:value="19183.5952030124" calcext:value-type="float">
            <text:p>19184</text:p>
          </table:table-cell>
          <table:table-cell table:style-name="ce105" table:formula="of:=SUM([.N34:.N36])" office:value-type="float" office:value="19183.5952030124" calcext:value-type="float">
            <text:p>19184</text:p>
          </table:table-cell>
          <table:table-cell table:style-name="ce105" table:formula="of:=SUM([.O34:.O36])" office:value-type="float" office:value="19183.5952030124" calcext:value-type="float">
            <text:p>19184</text:p>
          </table:table-cell>
          <table:table-cell table:style-name="ce105" table:formula="of:=SUM([.D33:.O33])" office:value-type="float" office:value="230203.142436149" calcext:value-type="float">
            <text:p>230203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.C26]" office:value-type="float" office:value="141.536960345679" calcext:value-type="float">
            <text:p>141.54</text:p>
          </table:table-cell>
          <table:table-cell table:style-name="ce108" table:formula="of:=+[.$C$34]*[.C16]" office:value-type="float" office:value="7642.99585866667" calcext:value-type="float">
            <text:p>7643</text:p>
          </table:table-cell>
          <table:table-cell table:style-name="ce108" table:formula="of:=+[.$C$34]*[.D16]" office:value-type="float" office:value="7642.99585866667" calcext:value-type="float">
            <text:p>7643</text:p>
          </table:table-cell>
          <table:table-cell table:style-name="ce108" table:formula="of:=+[.$C$34]*[.E16]" office:value-type="float" office:value="7642.99585866667" calcext:value-type="float">
            <text:p>7643</text:p>
          </table:table-cell>
          <table:table-cell table:style-name="ce108" table:formula="of:=+[.$C$34]*[.F16]" office:value-type="float" office:value="7642.99585866667" calcext:value-type="float">
            <text:p>7643</text:p>
          </table:table-cell>
          <table:table-cell table:style-name="ce108" table:formula="of:=+[.$C$34]*[.G16]" office:value-type="float" office:value="7642.99585866667" calcext:value-type="float">
            <text:p>7643</text:p>
          </table:table-cell>
          <table:table-cell table:style-name="ce108" table:formula="of:=+[.$C$34]*[.H16]" office:value-type="float" office:value="7642.99585866667" calcext:value-type="float">
            <text:p>7643</text:p>
          </table:table-cell>
          <table:table-cell table:style-name="ce108" table:formula="of:=+[.$C$34]*[.I16]" office:value-type="float" office:value="7642.99585866667" calcext:value-type="float">
            <text:p>7643</text:p>
          </table:table-cell>
          <table:table-cell table:style-name="ce108" table:formula="of:=+[.$C$34]*[.J16]" office:value-type="float" office:value="7642.99585866667" calcext:value-type="float">
            <text:p>7643</text:p>
          </table:table-cell>
          <table:table-cell table:style-name="ce108" table:formula="of:=+[.$C$34]*[.K16]" office:value-type="float" office:value="7642.99585866667" calcext:value-type="float">
            <text:p>7643</text:p>
          </table:table-cell>
          <table:table-cell table:style-name="ce108" table:formula="of:=+[.$C$34]*[.L16]" office:value-type="float" office:value="7642.99585866667" calcext:value-type="float">
            <text:p>7643</text:p>
          </table:table-cell>
          <table:table-cell table:style-name="ce108" table:formula="of:=+[.$C$34]*[.M16]" office:value-type="float" office:value="7642.99585866667" calcext:value-type="float">
            <text:p>7643</text:p>
          </table:table-cell>
          <table:table-cell table:style-name="ce108" table:formula="of:=+[.$C$34]*[.N16]" office:value-type="float" office:value="7642.99585866667" calcext:value-type="float">
            <text:p>7643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.C27]" office:value-type="float" office:value="111.129227012346" calcext:value-type="float">
            <text:p>111.13</text:p>
          </table:table-cell>
          <table:table-cell table:style-name="ce108" table:formula="of:=+[.$C$35]*[.C17]" office:value-type="float" office:value="6112.10748567903" calcext:value-type="float">
            <text:p>6112</text:p>
          </table:table-cell>
          <table:table-cell table:style-name="ce108" table:formula="of:=+[.$C$35]*[.D17]" office:value-type="float" office:value="6112.10748567903" calcext:value-type="float">
            <text:p>6112</text:p>
          </table:table-cell>
          <table:table-cell table:style-name="ce108" table:formula="of:=+[.$C$35]*[.E17]" office:value-type="float" office:value="6112.10748567903" calcext:value-type="float">
            <text:p>6112</text:p>
          </table:table-cell>
          <table:table-cell table:style-name="ce108" table:formula="of:=+[.$C$35]*[.F17]" office:value-type="float" office:value="6112.10748567903" calcext:value-type="float">
            <text:p>6112</text:p>
          </table:table-cell>
          <table:table-cell table:style-name="ce108" table:formula="of:=+[.$C$35]*[.G17]" office:value-type="float" office:value="6112.10748567903" calcext:value-type="float">
            <text:p>6112</text:p>
          </table:table-cell>
          <table:table-cell table:style-name="ce108" table:formula="of:=+[.$C$35]*[.H17]" office:value-type="float" office:value="6112.10748567903" calcext:value-type="float">
            <text:p>6112</text:p>
          </table:table-cell>
          <table:table-cell table:style-name="ce108" table:formula="of:=+[.$C$35]*[.I17]" office:value-type="float" office:value="6112.10748567903" calcext:value-type="float">
            <text:p>6112</text:p>
          </table:table-cell>
          <table:table-cell table:style-name="ce108" table:formula="of:=+[.$C$35]*[.J17]" office:value-type="float" office:value="6112.10748567903" calcext:value-type="float">
            <text:p>6112</text:p>
          </table:table-cell>
          <table:table-cell table:style-name="ce108" table:formula="of:=+[.$C$35]*[.K17]" office:value-type="float" office:value="6112.10748567903" calcext:value-type="float">
            <text:p>6112</text:p>
          </table:table-cell>
          <table:table-cell table:style-name="ce108" table:formula="of:=+[.$C$35]*[.L17]" office:value-type="float" office:value="6112.10748567903" calcext:value-type="float">
            <text:p>6112</text:p>
          </table:table-cell>
          <table:table-cell table:style-name="ce108" table:formula="of:=+[.$C$35]*[.M17]" office:value-type="float" office:value="6112.10748567903" calcext:value-type="float">
            <text:p>6112</text:p>
          </table:table-cell>
          <table:table-cell table:style-name="ce108" table:formula="of:=+[.$C$35]*[.N17]" office:value-type="float" office:value="6112.10748567903" calcext:value-type="float">
            <text:p>6112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.C28]" office:value-type="float" office:value="100.527627012346" calcext:value-type="float">
            <text:p>100.53</text:p>
          </table:table-cell>
          <table:table-cell table:style-name="ce108" table:formula="of:=+[.$C$36]*[.C18]" office:value-type="float" office:value="5428.49185866668" calcext:value-type="float">
            <text:p>5428</text:p>
          </table:table-cell>
          <table:table-cell table:style-name="ce108" table:formula="of:=+[.$C$36]*[.D18]" office:value-type="float" office:value="5428.49185866668" calcext:value-type="float">
            <text:p>5428</text:p>
          </table:table-cell>
          <table:table-cell table:style-name="ce108" table:formula="of:=+[.$C$36]*[.E18]" office:value-type="float" office:value="5428.49185866668" calcext:value-type="float">
            <text:p>5428</text:p>
          </table:table-cell>
          <table:table-cell table:style-name="ce108" table:formula="of:=+[.$C$36]*[.F18]" office:value-type="float" office:value="5428.49185866668" calcext:value-type="float">
            <text:p>5428</text:p>
          </table:table-cell>
          <table:table-cell table:style-name="ce108" table:formula="of:=+[.$C$36]*[.G18]" office:value-type="float" office:value="5428.49185866668" calcext:value-type="float">
            <text:p>5428</text:p>
          </table:table-cell>
          <table:table-cell table:style-name="ce108" table:formula="of:=+[.$C$36]*[.H18]" office:value-type="float" office:value="5428.49185866668" calcext:value-type="float">
            <text:p>5428</text:p>
          </table:table-cell>
          <table:table-cell table:style-name="ce108" table:formula="of:=+[.$C$36]*[.I18]" office:value-type="float" office:value="5428.49185866668" calcext:value-type="float">
            <text:p>5428</text:p>
          </table:table-cell>
          <table:table-cell table:style-name="ce108" table:formula="of:=+[.$C$36]*[.J18]" office:value-type="float" office:value="5428.49185866668" calcext:value-type="float">
            <text:p>5428</text:p>
          </table:table-cell>
          <table:table-cell table:style-name="ce108" table:formula="of:=+[.$C$36]*[.K18]" office:value-type="float" office:value="5428.49185866668" calcext:value-type="float">
            <text:p>5428</text:p>
          </table:table-cell>
          <table:table-cell table:style-name="ce108" table:formula="of:=+[.$C$36]*[.L18]" office:value-type="float" office:value="5428.49185866668" calcext:value-type="float">
            <text:p>5428</text:p>
          </table:table-cell>
          <table:table-cell table:style-name="ce108" table:formula="of:=+[.$C$36]*[.M18]" office:value-type="float" office:value="5428.49185866668" calcext:value-type="float">
            <text:p>5428</text:p>
          </table:table-cell>
          <table:table-cell table:style-name="ce108" table:formula="of:=+[.$C$36]*[.N18]" office:value-type="float" office:value="5428.49185866668" calcext:value-type="float">
            <text:p>5428</text:p>
          </table:table-cell>
          <table:table-cell table:style-name="ce108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nversión inicial" table:style-name="ta6">
        <office:forms form:automatic-focus="false" form:apply-design-mode="false"/>
        <table:table-column table:style-name="co9" table:default-cell-style-name="ce112"/>
        <table:table-column table:style-name="co10" table:default-cell-style-name="ce113"/>
        <table:table-column table:style-name="co11" table:default-cell-style-name="ce112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4" table:number-columns-repeated="16376" table:default-cell-style-name="ce112"/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7" table:number-rows-spanned="1">
            <text:p>CUADRO N°03</text:p>
          </table:table-cell>
          <table:covered-table-cell table:number-columns-repeated="6" table:style-name="ce115"/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 table:number-columns-spanned="7" table:number-rows-spanned="1">
            <text:p>PRESUPUESTO DE INVERSIÓN Y FINANCIAMIENTO</text:p>
          </table:table-cell>
          <table:covered-table-cell table:number-columns-repeated="6" table:style-name="ce11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1" table:number-rows-spanned="2">
            <text:p>RUBRO</text:p>
          </table:table-cell>
          <table:table-cell table:style-name="ce114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115"/>
          <table:table-cell table:style-name="ce114" office:value-type="string" calcext:value-type="string" table:number-columns-spanned="2" table:number-rows-spanned="1">
            <text:p>FINANCIAMIENTO</text:p>
          </table:table-cell>
          <table:covered-table-cell table:style-name="ce115"/>
          <table:table-cell table:number-columns-repeated="16376"/>
        </table:table-row>
        <table:table-row table:style-name="ro7">
          <table:table-cell/>
          <table:covered-table-cell table:style-name="ce115"/>
          <table:table-cell table:style-name="ce122" office:value-type="string" calcext:value-type="string">
            <text:p>Unidad de Medida</text:p>
          </table:table-cell>
          <table:table-cell table:style-name="ce122" office:value-type="string" calcext:value-type="string">
            <text:p>Unidad Requerida</text:p>
          </table:table-cell>
          <table:table-cell table:style-name="ce122" office:value-type="string" calcext:value-type="string">
            <text:p>Valor Unitario</text:p>
          </table:table-cell>
          <table:table-cell table:style-name="ce122" office:value-type="string" calcext:value-type="string">
            <text:p>Total</text:p>
          </table:table-cell>
          <table:table-cell table:style-name="ce122" office:value-type="string" calcext:value-type="string">
            <text:p>Capital Propio</text:p>
          </table:table-cell>
          <table:table-cell table:style-name="ce122" office:value-type="string" calcext:value-type="string">
            <text:p>Préstamo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ACTIVO FIJO</text:p>
          </table:table-cell>
          <table:table-cell table:style-name="ce116" table:number-columns-repeated="3"/>
          <table:table-cell table:style-name="ce116" table:formula="of:=+[.F9]+[.F14]+[.F25]+[.F31]+[.F35]" office:value-type="float" office:value="12147.0833333333" calcext:value-type="float">
            <text:p>12147.0833333333</text:p>
          </table:table-cell>
          <table:table-cell table:style-name="ce116" table:number-columns-repeated="2"/>
          <table:table-cell table:number-columns-repeated="16376"/>
        </table:table-row>
        <table:table-row table:style-name="ro1">
          <table:table-cell/>
          <table:table-cell table:style-name="ce117" office:value-type="string" calcext:value-type="string">
            <text:p>A. TANGIBLES</text:p>
          </table:table-cell>
          <table:table-cell table:style-name="ce123"/>
          <table:table-cell table:style-name="ce130" table:number-columns-repeated="2"/>
          <table:table-cell table:style-name="ce142" table:formula="of:=+[.F9]+[.F14]+[.F25]+[.F31]" office:value-type="float" office:value="11504.0277777778" calcext:value-type="float">
            <text:p>11504.03</text:p>
          </table:table-cell>
          <table:table-cell table:style-name="ce130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Maquinarias y equipos </text:p>
          </table:table-cell>
          <table:table-cell table:style-name="ce124"/>
          <table:table-cell table:style-name="ce131" table:number-columns-repeated="2"/>
          <table:table-cell table:style-name="ce143" table:formula="of:=SUM([.F10:.F13])" office:value-type="float" office:value="4402.77777777778" calcext:value-type="float">
            <text:p>4402.78</text:p>
          </table:table-cell>
          <table:table-cell table:style-name="ce131"/>
          <table:table-cell table:style-name="ce143" table:formula="of:=+[.F9]" office:value-type="float" office:value="4402.77777777778" calcext:value-type="float">
            <text:p>4402.78</text:p>
          </table:table-cell>
          <table:table-cell>
            <draw:frame draw:z-index="0" draw:name="image3.png" draw:style-name="gr1" draw:text-style-name="P1" svg:width="14.578cm" svg:height="13.149cm" svg:x="0.148cm" svg:y="-0.562cm">
              <draw:image xlink:href="Pictures/100000010000044600000392B0635EF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table:style-name="ce119" office:value-type="string" calcext:value-type="string">
            <text:p>Máquina de coser recta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3" calcext:value-type="float">
            <text:p>3</text:p>
          </table:table-cell>
          <table:table-cell table:style-name="ce136" table:formula="of:=2200/[$Resumen.C20]" office:value-type="float" office:value="611.111111111111" calcext:value-type="float">
            <text:p>611.111</text:p>
          </table:table-cell>
          <table:table-cell table:style-name="ce137" table:formula="of:=+[.E10]*[.D10]" office:value-type="float" office:value="1833.33333333333" calcext:value-type="float">
            <text:p>1833.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àquina remalladora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1" calcext:value-type="float">
            <text:p>1</text:p>
          </table:table-cell>
          <table:table-cell table:style-name="ce136" table:formula="of:=2500/[$Resumen.C20]" office:value-type="float" office:value="694.444444444445" calcext:value-type="float">
            <text:p>694.444</text:p>
          </table:table-cell>
          <table:table-cell table:style-name="ce137" table:formula="of:=+[.D11]*[.E11]" office:value-type="float" office:value="694.444444444445" calcext:value-type="float">
            <text:p>694.44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Balanza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41.6666666666667" calcext:value-type="float">
            <text:p>41.667</text:p>
          </table:table-cell>
          <table:table-cell table:style-name="ce137" table:formula="of:=+[.E12]*[.D12]" office:value-type="float" office:value="208.333333333333" calcext:value-type="float">
            <text:p>208.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áquina tejedora artesanal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4" calcext:value-type="float">
            <text:p>4</text:p>
          </table:table-cell>
          <table:table-cell table:style-name="ce136" table:formula="of:=1500/[$Resumen.C20]" office:value-type="float" office:value="416.666666666667" calcext:value-type="float">
            <text:p>416.667</text:p>
          </table:table-cell>
          <table:table-cell table:style-name="ce137" table:formula="of:=+[.E13]*[.D13]" office:value-type="float" office:value="1666.66666666667" calcext:value-type="float">
            <text:p>1666.6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Herramientas y utensilios</text:p>
          </table:table-cell>
          <table:table-cell table:style-name="ce124"/>
          <table:table-cell table:style-name="ce131"/>
          <table:table-cell table:style-name="ce136"/>
          <table:table-cell table:style-name="ce143" table:formula="of:=SUM([.F15:.F24])" office:value-type="float" office:value="1270.69444444444" calcext:value-type="float">
            <text:p>1270.69</text:p>
          </table:table-cell>
          <table:table-cell table:style-name="ce131"/>
          <table:table-cell table:style-name="ce143" table:formula="of:=+[.F14]" office:value-type="float" office:value="1270.69444444444" calcext:value-type="float">
            <text:p>1270.69</text:p>
          </table:table-cell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Papel para patronaje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60" calcext:value-type="float">
            <text:p>60</text:p>
          </table:table-cell>
          <table:table-cell table:style-name="ce137" office:value-type="float" office:value="0.194444444444444" calcext:value-type="float">
            <text:p>0.19</text:p>
          </table:table-cell>
          <table:table-cell table:style-name="ce137" table:formula="of:=+[.E15]*[.D15]" office:value-type="float" office:value="11.6666666666667" calcext:value-type="float">
            <text:p>11.6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arcadore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12" calcext:value-type="float">
            <text:p>12</text:p>
          </table:table-cell>
          <table:table-cell table:style-name="ce137" office:value-type="float" office:value="0.347222222222222" calcext:value-type="float">
            <text:p>0.35</text:p>
          </table:table-cell>
          <table:table-cell table:style-name="ce137" table:formula="of:=+[.E16]*[.D16]" office:value-type="float" office:value="4.16666666666667" calcext:value-type="float">
            <text:p>4.1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Agujas Nº 8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.66666666666667" calcext:value-type="float">
            <text:p>1.67</text:p>
          </table:table-cell>
          <table:table-cell table:style-name="ce137" table:formula="of:=+[.E17]*[.D17]" office:value-type="float" office:value="41.6666666666667" calcext:value-type="float">
            <text:p>41.6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Agujas Nº 4.5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.38888888888889" calcext:value-type="float">
            <text:p>1.39</text:p>
          </table:table-cell>
          <table:table-cell table:style-name="ce137" table:formula="of:=+[.E18]*[.D18]" office:value-type="float" office:value="34.7222222222222" calcext:value-type="float">
            <text:p>34.72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Agujas Nº 5.5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.38888888888889" calcext:value-type="float">
            <text:p>1.39</text:p>
          </table:table-cell>
          <table:table-cell table:style-name="ce137" table:formula="of:=+[.E19]*[.D19]" office:value-type="float" office:value="34.7222222222222" calcext:value-type="float">
            <text:p>34.72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Agujas Nº 5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.38888888888889" calcext:value-type="float">
            <text:p>1.39</text:p>
          </table:table-cell>
          <table:table-cell table:style-name="ce137" table:formula="of:=+[.E20]*[.D20]" office:value-type="float" office:value="34.7222222222222" calcext:value-type="float">
            <text:p>34.72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Cintas métrica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0.361111111111111" calcext:value-type="float">
            <text:p>0.36</text:p>
          </table:table-cell>
          <table:table-cell table:style-name="ce137" table:formula="of:=+[.E21]*[.D21]" office:value-type="float" office:value="9.02777777777778" calcext:value-type="float">
            <text:p>9.0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Juego de regla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6.11111111111111" calcext:value-type="float">
            <text:p>6.11</text:p>
          </table:table-cell>
          <table:table-cell table:style-name="ce137" table:formula="of:=+[.E22]*[.D22]" office:value-type="float" office:value="30.5555555555556" calcext:value-type="float">
            <text:p>30.56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Tijera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.11111111111111" calcext:value-type="float">
            <text:p>1.11</text:p>
          </table:table-cell>
          <table:table-cell table:style-name="ce137" table:formula="of:=+[.E23]*[.D23]" office:value-type="float" office:value="27.7777777777778" calcext:value-type="float">
            <text:p>27.78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Herramientas y utensilio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50" calcext:value-type="float">
            <text:p>250</text:p>
          </table:table-cell>
          <table:table-cell table:style-name="ce137" table:formula="of:=15/[$Resumen.C20]" office:value-type="float" office:value="4.16666666666667" calcext:value-type="float">
            <text:p>4.17</text:p>
          </table:table-cell>
          <table:table-cell table:style-name="ce137" table:formula="of:=+[.D24]*[.E24]" office:value-type="float" office:value="1041.66666666667" calcext:value-type="float">
            <text:p>1041.6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Muebles y <text:s/>enseres</text:p>
          </table:table-cell>
          <table:table-cell table:style-name="ce124"/>
          <table:table-cell table:style-name="ce131"/>
          <table:table-cell table:style-name="ce136"/>
          <table:table-cell table:style-name="ce143" table:formula="of:=SUM([.F26:.F30])" office:value-type="float" office:value="1275" calcext:value-type="float">
            <text:p>1275.00</text:p>
          </table:table-cell>
          <table:table-cell table:style-name="ce131"/>
          <table:table-cell table:style-name="ce137" table:formula="of:=+[.F25]" office:value-type="float" office:value="1275" calcext:value-type="float">
            <text:p>1275.00</text:p>
          </table:table-cell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esas redondas de plástico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7" calcext:value-type="float">
            <text:p>7</text:p>
          </table:table-cell>
          <table:table-cell table:style-name="ce136" office:value-type="float" office:value="15" calcext:value-type="float">
            <text:p>15.000</text:p>
          </table:table-cell>
          <table:table-cell table:style-name="ce137" table:formula="of:=+[.E26]*[.D26]" office:value-type="float" office:value="105" calcext:value-type="float">
            <text:p>105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Sillas de plástico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15" calcext:value-type="float">
            <text:p>15</text:p>
          </table:table-cell>
          <table:table-cell table:style-name="ce136" office:value-type="float" office:value="10" calcext:value-type="float">
            <text:p>10.000</text:p>
          </table:table-cell>
          <table:table-cell table:style-name="ce137" table:formula="of:=+[.E27]*[.D27]" office:value-type="float" office:value="150" calcext:value-type="float">
            <text:p>15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Escritorio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4" calcext:value-type="float">
            <text:p>4</text:p>
          </table:table-cell>
          <table:table-cell table:style-name="ce136" office:value-type="float" office:value="150" calcext:value-type="float">
            <text:p>150.000</text:p>
          </table:table-cell>
          <table:table-cell table:style-name="ce137" table:formula="of:=+[.E28]*[.D28]" office:value-type="float" office:value="600" calcext:value-type="float">
            <text:p>60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Sillas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4" calcext:value-type="float">
            <text:p>4</text:p>
          </table:table-cell>
          <table:table-cell table:style-name="ce136" office:value-type="float" office:value="30" calcext:value-type="float">
            <text:p>30.000</text:p>
          </table:table-cell>
          <table:table-cell table:style-name="ce137" table:formula="of:=+[.E29]*[.D29]" office:value-type="float" office:value="120" calcext:value-type="float">
            <text:p>12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Estante de madera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60" calcext:value-type="float">
            <text:p>60.000</text:p>
          </table:table-cell>
          <table:table-cell table:style-name="ce137" table:formula="of:=+[.E30]*[.D30]" office:value-type="float" office:value="300" calcext:value-type="float">
            <text:p>30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Equipo informatico</text:p>
          </table:table-cell>
          <table:table-cell table:style-name="ce124"/>
          <table:table-cell table:style-name="ce131" table:number-columns-repeated="2"/>
          <table:table-cell table:style-name="ce144" table:formula="of:=SUM([.F32:.F34])" office:value-type="float" office:value="4555.55555555556" calcext:value-type="float">
            <text:p>4555.6</text:p>
          </table:table-cell>
          <table:table-cell table:style-name="ce131"/>
          <table:table-cell table:style-name="ce137" table:formula="of:=+[.F31]" office:value-type="float" office:value="4555.55555555556" calcext:value-type="float">
            <text:p>4555.56</text:p>
          </table:table-cell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Equipo de cómputo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4" calcext:value-type="float">
            <text:p>4</text:p>
          </table:table-cell>
          <table:table-cell table:style-name="ce138" office:value-type="float" office:value="833.333333333333" calcext:value-type="float">
            <text:p>833</text:p>
          </table:table-cell>
          <table:table-cell table:style-name="ce138" table:formula="of:=+[.E32]*[.D32]" office:value-type="float" office:value="3333.33333333333" calcext:value-type="float">
            <text:p>33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Impresora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2" calcext:value-type="float">
            <text:p>2</text:p>
          </table:table-cell>
          <table:table-cell table:style-name="ce138" office:value-type="float" office:value="194.444444444444" calcext:value-type="float">
            <text:p>194</text:p>
          </table:table-cell>
          <table:table-cell table:style-name="ce138" table:formula="of:=+[.E33]*[.D33]" office:value-type="float" office:value="388.888888888889" calcext:value-type="float">
            <text:p>389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Laptop</text:p>
          </table:table-cell>
          <table:table-cell table:style-name="ce124" office:value-type="string" calcext:value-type="string">
            <text:p>Unidad</text:p>
          </table:table-cell>
          <table:table-cell table:style-name="ce131" office:value-type="float" office:value="1" calcext:value-type="float">
            <text:p>1</text:p>
          </table:table-cell>
          <table:table-cell table:style-name="ce138" office:value-type="float" office:value="833.333333333333" calcext:value-type="float">
            <text:p>833</text:p>
          </table:table-cell>
          <table:table-cell table:style-name="ce138" table:formula="of:=+[.E34]*[.D34]" office:value-type="float" office:value="833.333333333333" calcext:value-type="float">
            <text:p>8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7" office:value-type="string" calcext:value-type="string">
            <text:p>B. INTANGIBLES</text:p>
          </table:table-cell>
          <table:table-cell table:style-name="ce123"/>
          <table:table-cell table:style-name="ce130" table:number-columns-repeated="2"/>
          <table:table-cell table:style-name="ce142" table:formula="of:=SUM([.F36:.F41])" office:value-type="float" office:value="643.055555555556" calcext:value-type="float">
            <text:p>643.06</text:p>
          </table:table-cell>
          <table:table-cell table:style-name="ce147" table:formula="of:=[.F35]" office:value-type="float" office:value="643.055555555556" calcext:value-type="float">
            <text:p>643.06</text:p>
          </table:table-cell>
          <table:table-cell table:style-name="ce147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Constitución y formalización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50" calcext:value-type="float">
            <text:p>250</text:p>
          </table:table-cell>
          <table:table-cell table:style-name="ce137" table:formula="of:=+[.E36]*[.D36]" office:value-type="float" office:value="250" calcext:value-type="float">
            <text:p>25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Licencias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55.5555555555556" calcext:value-type="float">
            <text:p>55.6</text:p>
          </table:table-cell>
          <table:table-cell table:style-name="ce137" table:formula="of:=+[.E37]*[.D37]" office:value-type="float" office:value="55.5555555555556" calcext:value-type="float">
            <text:p>55.56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Certificaciones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4.16666666666667" calcext:value-type="float">
            <text:p>4.2</text:p>
          </table:table-cell>
          <table:table-cell table:style-name="ce137" table:formula="of:=+[.E38]*[.D38]" office:value-type="float" office:value="4.16666666666667" calcext:value-type="float">
            <text:p>4.1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Capacitaciones (tejedoras)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38.888888888889" calcext:value-type="float">
            <text:p>138.9</text:p>
          </table:table-cell>
          <table:table-cell table:style-name="ce137" table:formula="of:=+[.E39]*[.D39]" office:value-type="float" office:value="138.888888888889" calcext:value-type="float">
            <text:p>138.89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Promocion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38.888888888889" calcext:value-type="float">
            <text:p>138.9</text:p>
          </table:table-cell>
          <table:table-cell table:style-name="ce137" table:formula="of:=+[.E40]*[.D40]" office:value-type="float" office:value="138.888888888889" calcext:value-type="float">
            <text:p>138.89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Implementación y puesta en marcha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55.5555555555556" calcext:value-type="float">
            <text:p>55.6</text:p>
          </table:table-cell>
          <table:table-cell table:style-name="ce137" table:formula="of:=+[.E41]*[.D41]" office:value-type="float" office:value="55.5555555555556" calcext:value-type="float">
            <text:p>55.56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20" office:value-type="string" calcext:value-type="string">
            <text:p>TOTAL DE ACTIVO FIJO</text:p>
          </table:table-cell>
          <table:table-cell table:style-name="ce125"/>
          <table:table-cell table:style-name="ce132" table:number-columns-repeated="2"/>
          <table:table-cell table:style-name="ce145" table:formula="of:=+[.F31]+[.F25]+[.F14]+[.F9]" office:value-type="float" office:value="11504.0277777778" calcext:value-type="float">
            <text:p>11504.03</text:p>
          </table:table-cell>
          <table:table-cell table:style-name="ce132" table:number-columns-repeated="2"/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CAPITAL DE TRABAJO (150 unidades -AÑO 1)</text:p>
          </table:table-cell>
          <table:table-cell table:style-name="ce116" table:number-columns-repeated="3"/>
          <table:table-cell table:style-name="ce116" table:formula="of:=+[.F44]+[.F48]+[.F52]+[.F58]" office:value-type="float" office:value="15481.3094722222" calcext:value-type="float">
            <text:p>15481.3094722222</text:p>
          </table:table-cell>
          <table:table-cell table:style-name="ce116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ateria prima</text:p>
          </table:table-cell>
          <table:table-cell table:style-name="ce124"/>
          <table:table-cell table:style-name="ce131" table:number-columns-repeated="2"/>
          <table:table-cell table:style-name="ce143" table:formula="of:=SUM([.F45:.F47])" office:value-type="float" office:value="7634.92058333333" calcext:value-type="float">
            <text:p>7634.92</text:p>
          </table:table-cell>
          <table:table-cell table:style-name="ce137" office:value-type="float" office:value="6500" calcext:value-type="float">
            <text:p>6500.00</text:p>
          </table:table-cell>
          <table:table-cell table:style-name="ce137" table:formula="of:=+[.F44]-[.G44]" office:value-type="float" office:value="1134.92058333333" calcext:value-type="float">
            <text:p>1134.92</text:p>
          </table:table-cell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A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6" table:formula="of:=+[$'Costo de producción'.C8]" office:value-type="float" office:value="67.5394705555556" calcext:value-type="float">
            <text:p>67.539</text:p>
          </table:table-cell>
          <table:table-cell table:style-name="ce137" table:formula="of:=+[.E45]*[.D45]" office:value-type="float" office:value="3376.97352777778" calcext:value-type="float">
            <text:p>3376.9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B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7" table:formula="of:=+[$'Costo de producción'.C13]" office:value-type="float" office:value="44.9194705555556" calcext:value-type="float">
            <text:p>44.92</text:p>
          </table:table-cell>
          <table:table-cell table:style-name="ce137" table:formula="of:=+[.E46]*[.D46]" office:value-type="float" office:value="2245.97352777778" calcext:value-type="float">
            <text:p>2245.9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C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6" table:formula="of:=+[$'Costo de producción'.C18]" office:value-type="float" office:value="40.2394705555556" calcext:value-type="float">
            <text:p>40.239</text:p>
          </table:table-cell>
          <table:table-cell table:style-name="ce137" table:formula="of:=+[.E47]*[.D47]" office:value-type="float" office:value="2011.97352777778" calcext:value-type="float">
            <text:p>2011.9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Mano de obra</text:p>
          </table:table-cell>
          <table:table-cell table:style-name="ce126"/>
          <table:table-cell table:style-name="ce133" table:number-columns-repeated="2"/>
          <table:table-cell table:style-name="ce143" table:formula="of:=SUM([.F49:.F51])" office:value-type="float" office:value="3263.88888888889" calcext:value-type="float">
            <text:p>3263.89</text:p>
          </table:table-cell>
          <table:table-cell table:style-name="ce137" table:formula="of:=+[.F48]" office:value-type="float" office:value="3263.88888888889" calcext:value-type="float">
            <text:p>3263.89</text:p>
          </table:table-cell>
          <table:table-cell table:style-name="ce131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A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9" table:formula="of:=+[$Resumen.C16]" office:value-type="float" office:value="25" calcext:value-type="float">
            <text:p>25.0</text:p>
          </table:table-cell>
          <table:table-cell table:style-name="ce137" table:formula="of:=+[.E49]*[.D49]" office:value-type="float" office:value="1250" calcext:value-type="float">
            <text:p>1250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B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7" table:formula="of:=+[$Resumen.C17]" office:value-type="float" office:value="22.2222222222222" calcext:value-type="float">
            <text:p>22.22</text:p>
          </table:table-cell>
          <table:table-cell table:style-name="ce137" table:formula="of:=+[.E50]*[.D50]" office:value-type="float" office:value="1111.11111111111" calcext:value-type="float">
            <text:p>1111.11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odelo C</text:p>
          </table:table-cell>
          <table:table-cell table:style-name="ce124"/>
          <table:table-cell table:style-name="ce131" office:value-type="float" office:value="50" calcext:value-type="float">
            <text:p>50</text:p>
          </table:table-cell>
          <table:table-cell table:style-name="ce137" table:formula="of:=+[$Resumen.C18]" office:value-type="float" office:value="18.0555555555556" calcext:value-type="float">
            <text:p>18.06</text:p>
          </table:table-cell>
          <table:table-cell table:style-name="ce137" table:formula="of:=+[.E51]*[.D51]" office:value-type="float" office:value="902.77777777778" calcext:value-type="float">
            <text:p>902.78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Gastos de Administracion</text:p>
          </table:table-cell>
          <table:table-cell table:style-name="ce124"/>
          <table:table-cell table:style-name="ce131" table:number-columns-repeated="2"/>
          <table:table-cell table:style-name="ce143" table:formula="of:=SUM([.F53:.F57])" office:value-type="float" office:value="2808.33333333333" calcext:value-type="float">
            <text:p>2808.33</text:p>
          </table:table-cell>
          <table:table-cell table:style-name="ce137" table:formula="of:=[.F52]" office:value-type="float" office:value="2808.33333333333" calcext:value-type="float">
            <text:p>2808.33</text:p>
          </table:table-cell>
          <table:table-cell table:style-name="ce137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Sueldos del personal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0" table:formula="of:=+[$'Gastos operativos'.D8]" office:value-type="float" office:value="2295" calcext:value-type="float">
            <text:p>2,295</text:p>
          </table:table-cell>
          <table:table-cell table:style-name="ce137" table:formula="of:=+[.E53]*[.D53]" office:value-type="float" office:value="2295" calcext:value-type="float">
            <text:p>2295.0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Alquiler de local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1" table:formula="of:=+[$'Gastos operativos'.D9]" office:value-type="float" office:value="416.666666666667" calcext:value-type="float">
            <text:p>416.67</text:p>
          </table:table-cell>
          <table:table-cell table:style-name="ce137" table:formula="of:=+[.E54]*[.D54]" office:value-type="float" office:value="416.666666666667" calcext:value-type="float">
            <text:p>416.67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Servicios: Agua, luz, telefono e internet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1" table:formula="of:=+[$'Gastos operativos'.D10]" office:value-type="float" office:value="66.1111111111111" calcext:value-type="float">
            <text:p>66.11</text:p>
          </table:table-cell>
          <table:table-cell table:style-name="ce137" table:formula="of:=+[.E55]*[.D55]" office:value-type="float" office:value="66.1111111111111" calcext:value-type="float">
            <text:p>66.11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Mantenimiento y reparaciones.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1" table:formula="of:=+[$'Gastos operativos'.D11]" office:value-type="float" office:value="22.2222222222222" calcext:value-type="float">
            <text:p>22.22</text:p>
          </table:table-cell>
          <table:table-cell table:style-name="ce137" table:formula="of:=+[.E56]*[.D56]" office:value-type="float" office:value="22.2222222222222" calcext:value-type="float">
            <text:p>22.22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Utiles de oficina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1" table:formula="of:=+[$'Gastos operativos'.D12]" office:value-type="float" office:value="8.33333333333333" calcext:value-type="float">
            <text:p>8.33</text:p>
          </table:table-cell>
          <table:table-cell table:style-name="ce137" table:formula="of:=+[.E57]*[.D57]" office:value-type="float" office:value="8.33333333333333" calcext:value-type="float">
            <text:p>8.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Gastos de Ventas</text:p>
          </table:table-cell>
          <table:table-cell table:style-name="ce124"/>
          <table:table-cell table:style-name="ce131" table:number-columns-repeated="2"/>
          <table:table-cell table:style-name="ce143" table:formula="of:=SUM([.F59:.F62])" office:value-type="float" office:value="1774.16666666667" calcext:value-type="float">
            <text:p>1774.17</text:p>
          </table:table-cell>
          <table:table-cell table:style-name="ce137" table:formula="of:=[.F58]" office:value-type="float" office:value="1774.16666666667" calcext:value-type="float">
            <text:p>1774.17</text:p>
          </table:table-cell>
          <table:table-cell table:style-name="ce137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Sueldos del personal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0" table:formula="of:=+[$'Gastos operativos'.D16]" office:value-type="float" office:value="607.5" calcext:value-type="float">
            <text:p>608</text:p>
          </table:table-cell>
          <table:table-cell table:style-name="ce137" table:formula="of:=+[.E59]*[.D59]" office:value-type="float" office:value="607.5" calcext:value-type="float">
            <text:p>607.50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Costos de envío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0" table:formula="of:=+[$'Gastos operativos'.D17]" office:value-type="float" office:value="972.222222222222" calcext:value-type="float">
            <text:p>972</text:p>
          </table:table-cell>
          <table:table-cell table:style-name="ce137" table:formula="of:=+[.E60]*[.D60]" office:value-type="float" office:value="972.222222222222" calcext:value-type="float">
            <text:p>972.22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Promoción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0" table:formula="of:=+[$'Gastos operativos'.D18]" office:value-type="float" office:value="111.111111111111" calcext:value-type="float">
            <text:p>111</text:p>
          </table:table-cell>
          <table:table-cell table:style-name="ce137" table:formula="of:=+[.E61]*[.D61]" office:value-type="float" office:value="111.111111111111" calcext:value-type="float">
            <text:p>111.11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19" office:value-type="string" calcext:value-type="string">
            <text:p>Otros</text:p>
          </table:table-cell>
          <table:table-cell table:style-name="ce124"/>
          <table:table-cell table:style-name="ce131" office:value-type="float" office:value="1" calcext:value-type="float">
            <text:p>1</text:p>
          </table:table-cell>
          <table:table-cell table:style-name="ce140" table:formula="of:=+[$'Gastos operativos'.D19]" office:value-type="float" office:value="83.3333333333333" calcext:value-type="float">
            <text:p>83</text:p>
          </table:table-cell>
          <table:table-cell table:style-name="ce137" table:formula="of:=+[.E62]*[.D62]" office:value-type="float" office:value="83.3333333333333" calcext:value-type="float">
            <text:p>83.33</text:p>
          </table:table-cell>
          <table:table-cell table:style-name="ce131" table:number-columns-repeated="2"/>
          <table:table-cell table:number-columns-repeated="16376"/>
        </table:table-row>
        <table:table-row table:style-name="ro1">
          <table:table-cell/>
          <table:table-cell table:style-name="ce120" office:value-type="string" calcext:value-type="string">
            <text:p>TOTAL DE CAPITAL DE TRABAJO</text:p>
          </table:table-cell>
          <table:table-cell table:style-name="ce127"/>
          <table:table-cell table:style-name="ce134" table:number-columns-repeated="2"/>
          <table:table-cell table:style-name="ce145" table:formula="of:=+[.F58]+[.F52]+[.F48]+[.F44]" office:value-type="float" office:value="15481.3094722222" calcext:value-type="float">
            <text:p>15481.31</text:p>
          </table:table-cell>
          <table:table-cell table:style-name="ce134" table:number-columns-repeated="2"/>
          <table:table-cell table:number-columns-repeated="16376"/>
        </table:table-row>
        <table:table-row table:style-name="ro1">
          <table:table-cell/>
          <table:table-cell table:style-name="ce121" office:value-type="string" calcext:value-type="string">
            <text:p>TOTAL DE INVERSIÓN</text:p>
          </table:table-cell>
          <table:table-cell table:style-name="ce128"/>
          <table:table-cell table:style-name="ce135" table:number-columns-repeated="2"/>
          <table:table-cell table:style-name="ce146" table:formula="of:=+[.F63]+[.F7]" office:value-type="float" office:value="27628.3928055556" calcext:value-type="float">
            <text:p>27628</text:p>
          </table:table-cell>
          <table:table-cell table:style-name="ce146" table:formula="of:=SUM([.G7:.G63])" office:value-type="float" office:value="14989.4444444444" calcext:value-type="float">
            <text:p>14989</text:p>
          </table:table-cell>
          <table:table-cell table:style-name="ce149" table:formula="of:=SUM([.H7:.H63])" office:value-type="float" office:value="12638.9483611111" calcext:value-type="float">
            <text:p>12639</text:p>
          </table:table-cell>
          <table:table-cell table:style-name="ce150"/>
          <table:table-cell table:number-columns-repeated="16375"/>
        </table:table-row>
        <table:table-row table:style-name="ro1">
          <table:table-cell table:number-columns-repeated="6"/>
          <table:table-cell table:style-name="ce148" table:formula="of:=+[.G64]/[.F64]" office:value-type="percentage" office:value="0.542537691205489" calcext:value-type="percentage">
            <text:p>54.25 %</text:p>
          </table:table-cell>
          <table:table-cell table:style-name="ce148" table:formula="of:=+[.H64]/[.F64]" office:value-type="percentage" office:value="0.457462308794511" calcext:value-type="percentage">
            <text:p>45.75 %</text:p>
          </table:table-cell>
          <table:table-cell table:number-columns-repeated="16376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" table:style-name="ta7">
        <table:table-column table:style-name="co17" table:default-cell-style-name="Default"/>
        <table:table-column table:style-name="co18" table:default-cell-style-name="ce154"/>
        <table:table-column table:style-name="co19" table:default-cell-style-name="ce158"/>
        <table:table-column table:style-name="co19" table:default-cell-style-name="ce161"/>
        <table:table-column table:style-name="co3" table:default-cell-style-name="ce163"/>
        <table:table-column table:style-name="co20" table:default-cell-style-name="ce164"/>
        <table:table-column table:style-name="co13" table:default-cell-style-name="ce166"/>
        <table:table-column table:style-name="co19" table:default-cell-style-name="ce159"/>
        <table:table-column table:style-name="co1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51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156"/>
          <table:table-cell table:style-name="ce169" table:formula="of:=[$Resumen.C9]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52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152"/>
          <table:table-cell table:number-columns-repeated="16376"/>
        </table:table-row>
        <table:table-row table:style-name="ro6">
          <table:table-cell/>
          <table:table-cell table:style-name="ce153" office:value-type="string" calcext:value-type="string">
            <text:p>ACTIVO FIJO</text:p>
          </table:table-cell>
          <table:table-cell table:style-name="ce157" office:value-type="string" calcext:value-type="string">
            <text:p>Valor de compra</text:p>
          </table:table-cell>
          <table:table-cell table:style-name="ce157" office:value-type="string" calcext:value-type="string">
            <text:p>Vida útil (años)</text:p>
          </table:table-cell>
          <table:table-cell table:style-name="ce157" office:value-type="string" calcext:value-type="string">
            <text:p>Tasa de Depreciacion</text:p>
          </table:table-cell>
          <table:table-cell table:style-name="ce157" office:value-type="string" calcext:value-type="string">
            <text:p>Depreciación anual</text:p>
          </table:table-cell>
          <table:table-cell table:style-name="ce157" office:value-type="string" calcext:value-type="string">
            <text:p>Depreciación Acumulada</text:p>
          </table:table-cell>
          <table:table-cell table:style-name="ce167" office:value-type="string" calcext:value-type="string">
            <text:p>Valor de Recupero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quinaria y equipos</text:p>
          </table:table-cell>
          <table:table-cell table:formula="of:=+[$'Inversión inicial'.F9]" office:value-type="float" office:value="4402.77777777778" calcext:value-type="float">
            <text:p>4403</text:p>
          </table:table-cell>
          <table:table-cell office:value-type="float" office:value="5" calcext:value-type="float">
            <text:p>5</text:p>
          </table:table-cell>
          <table:table-cell table:formula="of:=1/[.D5]" office:value-type="percentage" office:value="0.2" calcext:value-type="percentage">
            <text:p>20 %</text:p>
          </table:table-cell>
          <table:table-cell table:formula="of:=+[.E5]*[.C5]" office:value-type="float" office:value="880.555555555556" calcext:value-type="float">
            <text:p>881</text:p>
          </table:table-cell>
          <table:table-cell table:formula="of:=+[.F5]*[.$I$2]" office:value-type="float" office:value="2641.66666666667" calcext:value-type="float">
            <text:p>2642</text:p>
          </table:table-cell>
          <table:table-cell table:formula="of:=[.C5]-[.G5]" office:value-type="float" office:value="1761.11111111111" calcext:value-type="float">
            <text:p>176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erramientas y utensilios</text:p>
          </table:table-cell>
          <table:table-cell table:formula="of:=+[$'Inversión inicial'.F14]" office:value-type="float" office:value="1270.69444444444" calcext:value-type="float">
            <text:p>1271</text:p>
          </table:table-cell>
          <table:table-cell office:value-type="float" office:value="2" calcext:value-type="float">
            <text:p>2</text:p>
          </table:table-cell>
          <table:table-cell table:formula="of:=1/[.D6]" office:value-type="percentage" office:value="0.5" calcext:value-type="percentage">
            <text:p>50 %</text:p>
          </table:table-cell>
          <table:table-cell table:formula="of:=+[.E6]*[.C6]" office:value-type="float" office:value="635.347222222222" calcext:value-type="float">
            <text:p>635</text:p>
          </table:table-cell>
          <table:table-cell table:formula="of:=+[.F6]*1" office:value-type="float" office:value="635.347222222222" calcext:value-type="float">
            <text:p>635</text:p>
          </table:table-cell>
          <table:table-cell table:formula="of:=[.C6]-[.G6]" office:value-type="float" office:value="635.347222222222" calcext:value-type="float">
            <text:p>63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quipos informaticos</text:p>
          </table:table-cell>
          <table:table-cell table:formula="of:=+[$'Inversión inicial'.F31]" office:value-type="float" office:value="4555.55555555556" calcext:value-type="float">
            <text:p>4556</text:p>
          </table:table-cell>
          <table:table-cell office:value-type="float" office:value="3" calcext:value-type="float">
            <text:p>3</text:p>
          </table:table-cell>
          <table:table-cell table:formula="of:=1/[.D7]" office:value-type="percentage" office:value="0.333333333333333" calcext:value-type="percentage">
            <text:p>33 %</text:p>
          </table:table-cell>
          <table:table-cell table:formula="of:=+[.E7]*[.C7]" office:value-type="float" office:value="1518.51851851852" calcext:value-type="float">
            <text:p>1519</text:p>
          </table:table-cell>
          <table:table-cell table:formula="of:=+[.F7]*[.I2]" office:value-type="float" office:value="4555.55555555556" calcext:value-type="float">
            <text:p>4556</text:p>
          </table:table-cell>
          <table:table-cell table:formula="of:=[.C7]-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uebles y enseres</text:p>
          </table:table-cell>
          <table:table-cell table:style-name="ce159" table:formula="of:=+[$'Inversión inicial'.F25]" office:value-type="float" office:value="1275" calcext:value-type="float">
            <text:p>1275</text:p>
          </table:table-cell>
          <table:table-cell office:value-type="float" office:value="5" calcext:value-type="float">
            <text:p>5</text:p>
          </table:table-cell>
          <table:table-cell table:formula="of:=1/[.D8]" office:value-type="percentage" office:value="0.2" calcext:value-type="percentage">
            <text:p>20 %</text:p>
          </table:table-cell>
          <table:table-cell table:formula="of:=+[.E8]*[.C8]" office:value-type="float" office:value="255" calcext:value-type="float">
            <text:p>255</text:p>
          </table:table-cell>
          <table:table-cell table:formula="of:=+[.F8]*[.$I$2]" office:value-type="float" office:value="765" calcext:value-type="float">
            <text:p>765</text:p>
          </table:table-cell>
          <table:table-cell table:formula="of:=[.C8]-[.G8]" office:value-type="float" office:value="510" calcext:value-type="float">
            <text:p>510</text:p>
          </table:table-cell>
          <table:table-cell table:number-columns-repeated="16376"/>
        </table:table-row>
        <table:table-row table:style-name="ro1">
          <table:table-cell/>
          <table:table-cell table:style-name="ce155" office:value-type="string" calcext:value-type="string">
            <text:p>Total</text:p>
          </table:table-cell>
          <table:table-cell table:style-name="ce160"/>
          <table:table-cell table:style-name="ce162" table:number-columns-repeated="2"/>
          <table:table-cell table:style-name="ce165" table:formula="of:=SUM([.F5:.F8])" office:value-type="float" office:value="3289.4212962963" calcext:value-type="float">
            <text:p>3289</text:p>
          </table:table-cell>
          <table:table-cell table:style-name="ce160"/>
          <table:table-cell table:style-name="ce168" table:formula="of:=SUM([.H5:.H8])" office:value-type="float" office:value="2906.45833333333" calcext:value-type="float">
            <text:p>2906</text:p>
          </table:table-cell>
          <table:table-cell table:number-columns-repeated="16376"/>
        </table:table-row>
      </table:table>
      <table:table table:name="Costo de producción" table:style-name="ta8">
        <table:table-column table:style-name="co4" table:default-cell-style-name="ce16"/>
        <table:table-column table:style-name="co21" table:default-cell-style-name="ce16"/>
        <table:table-column table:style-name="co20" table:number-columns-repeated="5" table:default-cell-style-name="ce16"/>
        <table:table-column table:style-name="co4" table:number-columns-repeated="16377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70" office:value-type="string" calcext:value-type="string" table:number-columns-spanned="6" table:number-rows-spanned="1">
            <text:p>COSTOS DE PRODUCCIÓN O DE VENTAS 50 unidades</text:p>
          </table:table-cell>
          <table:covered-table-cell table:number-columns-repeated="5" table:style-name="ce181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1" office:value-type="string" calcext:value-type="string">
            <text:p>RUBRO</text:p>
          </table:table-cell>
          <table:table-cell table:style-name="ce171" office:value-type="string" calcext:value-type="string" table:number-columns-spanned="1" table:number-rows-spanned="2">
            <text:p>COSTO UNITARIO</text:p>
          </table:table-cell>
          <table:table-cell table:style-name="ce171" office:value-type="string" calcext:value-type="string" table:number-columns-spanned="1" table:number-rows-spanned="2">
            <text:p>UNIDADES REQUERIDAS</text:p>
          </table:table-cell>
          <table:table-cell table:style-name="ce171" office:value-type="string" calcext:value-type="string" table:number-columns-spanned="2" table:number-rows-spanned="1">
            <text:p>COSTO </text:p>
          </table:table-cell>
          <table:covered-table-cell table:style-name="ce195"/>
          <table:table-cell table:style-name="ce172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/>
          <table:table-cell table:style-name="ce172"/>
          <table:covered-table-cell table:number-columns-repeated="2" table:style-name="ce182"/>
          <table:table-cell table:style-name="ce172" office:value-type="string" calcext:value-type="string">
            <text:p>FIJO</text:p>
          </table:table-cell>
          <table:table-cell table:style-name="ce172" office:value-type="string" calcext:value-type="string">
            <text:p>VARIABLE</text:p>
          </table:table-cell>
          <table:table-cell table:style-name="ce172"/>
          <table:table-cell table:number-columns-repeated="16377"/>
        </table:table-row>
        <table:table-row table:style-name="ro1">
          <table:table-cell/>
          <table:table-cell table:style-name="ce173" office:value-type="string" calcext:value-type="string">
            <text:p>COSTOS DE PRODUCCION O VENTAS</text:p>
          </table:table-cell>
          <table:table-cell table:style-name="ce22" table:number-columns-repeated="5"/>
          <table:table-cell table:number-columns-repeated="16377"/>
        </table:table-row>
        <table:table-row table:style-name="ro1">
          <table:table-cell/>
          <table:table-cell table:style-name="ce77" office:value-type="string" calcext:value-type="string">
            <text:p><text:s/>Materia Prima Directa</text:p>
          </table:table-cell>
          <table:table-cell table:style-name="ce22" table:number-columns-repeated="3"/>
          <table:table-cell table:style-name="ce22" table:formula="of:=+[.F8]+[.F13]+[.F18]" office:value-type="float" office:value="7634.92058333333" calcext:value-type="float">
            <text:p>7634.92058333333</text:p>
          </table:table-cell>
          <table:table-cell table:style-name="ce22" table:formula="of:=+[.F7]" office:value-type="float" office:value="7634.92058333333" calcext:value-type="float">
            <text:p>7634.92058333333</text:p>
          </table:table-cell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Modelo A </text:p>
          </table:table-cell>
          <table:table-cell table:style-name="ce183" table:formula="of:=SUM([.C9:.C12])" office:value-type="float" office:value="67.5394705555556" calcext:value-type="float">
            <text:p>67.539</text:p>
          </table:table-cell>
          <table:table-cell table:style-name="ce174" table:number-columns-repeated="2"/>
          <table:table-cell table:style-name="ce174" table:formula="of:=SUM([.F9:.F12])" office:value-type="float" office:value="3376.97352777778" calcext:value-type="float">
            <text:p>3376.97352777778</text:p>
          </table:table-cell>
          <table:table-cell table:style-name="ce174" table:formula="of:=+[.F8]" office:value-type="float" office:value="3376.97352777778" calcext:value-type="float">
            <text:p>3376.973527777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184" table:formula="of:=+([$Resumen.C19]/100)*850" office:value-type="float" office:value="66.3" calcext:value-type="float">
            <text:p>66.30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9]*[.D9]" office:value-type="float" office:value="3315" calcext:value-type="float">
            <text:p>3315</text:p>
          </table:table-cell>
          <table:table-cell table:style-name="ce22" table:formula="of:=+[.F9]" office:value-type="float" office:value="3315" calcext:value-type="float">
            <text:p>3315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84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0]*[.D10]" office:value-type="float" office:value="13.8888888888889" calcext:value-type="float">
            <text:p>13.89</text:p>
          </table:table-cell>
          <table:table-cell table:style-name="ce20" table:formula="of:=+[.F10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84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1]*[.D11]" office:value-type="float" office:value="47.1646388888889" calcext:value-type="float">
            <text:p>47.16</text:p>
          </table:table-cell>
          <table:table-cell table:style-name="ce20" table:formula="of:=+[.F11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22" office:value-type="float" office:value="0.0184" calcext:value-type="float">
            <text:p>0.0184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2]*[.D12]" office:value-type="float" office:value="0.92" calcext:value-type="float">
            <text:p>0.92</text:p>
          </table:table-cell>
          <table:table-cell table:style-name="ce22" table:formula="of:=+[.F12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Modelo B</text:p>
          </table:table-cell>
          <table:table-cell table:style-name="ce21" table:formula="of:=SUM([.C14:.C17])" office:value-type="float" office:value="44.9194705555556" calcext:value-type="float">
            <text:p>44.92</text:p>
          </table:table-cell>
          <table:table-cell table:style-name="ce174" table:number-columns-repeated="2"/>
          <table:table-cell table:style-name="ce174" table:formula="of:=SUM([.F14:.F17])" office:value-type="float" office:value="2245.97352777778" calcext:value-type="float">
            <text:p>2245.97352777778</text:p>
          </table:table-cell>
          <table:table-cell table:style-name="ce174" table:formula="of:=+[.F13]" office:value-type="float" office:value="2245.97352777778" calcext:value-type="float">
            <text:p>2245.973527777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22" table:formula="of:=+([$Resumen.C19]/100)*560" office:value-type="float" office:value="43.68" calcext:value-type="float">
            <text:p>43.6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4]*[.D14]" office:value-type="float" office:value="2184" calcext:value-type="float">
            <text:p>2184</text:p>
          </table:table-cell>
          <table:table-cell table:style-name="ce22" table:formula="of:=+[.F14]" office:value-type="float" office:value="2184" calcext:value-type="float">
            <text:p>2184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84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5]*[.D15]" office:value-type="float" office:value="13.8888888888889" calcext:value-type="float">
            <text:p>13.89</text:p>
          </table:table-cell>
          <table:table-cell table:style-name="ce20" table:formula="of:=+[.F15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84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6]*[.D16]" office:value-type="float" office:value="47.1646388888889" calcext:value-type="float">
            <text:p>47.16</text:p>
          </table:table-cell>
          <table:table-cell table:style-name="ce20" table:formula="of:=+[.F16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184" office:value-type="float" office:value="0.0184" calcext:value-type="float">
            <text:p>0.01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7]*[.D17]" office:value-type="float" office:value="0.92" calcext:value-type="float">
            <text:p>0.92</text:p>
          </table:table-cell>
          <table:table-cell table:style-name="ce22" table:formula="of:=+[.F17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Modelo C</text:p>
          </table:table-cell>
          <table:table-cell table:style-name="ce183" table:formula="of:=SUM([.C19:.C22])" office:value-type="float" office:value="40.2394705555556" calcext:value-type="float">
            <text:p>40.239</text:p>
          </table:table-cell>
          <table:table-cell table:style-name="ce174" table:number-columns-repeated="2"/>
          <table:table-cell table:style-name="ce196" table:formula="of:=SUM([.F19:.F22])" office:value-type="float" office:value="2011.97352777778" calcext:value-type="float">
            <text:p>2011.97</text:p>
          </table:table-cell>
          <table:table-cell table:style-name="ce196" table:formula="of:=+[.F18]" office:value-type="float" office:value="2011.97352777778" calcext:value-type="float">
            <text:p>2011.97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184" table:formula="of:=+([$Resumen.C19]/100)*500" office:value-type="float" office:value="39" calcext:value-type="float">
            <text:p>39.00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9]*[.D19]" office:value-type="float" office:value="1950" calcext:value-type="float">
            <text:p>1950</text:p>
          </table:table-cell>
          <table:table-cell table:style-name="ce22" table:formula="of:=+[.F19]" office:value-type="float" office:value="1950" calcext:value-type="float">
            <text:p>195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84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0]*[.D20]" office:value-type="float" office:value="13.8888888888889" calcext:value-type="float">
            <text:p>13.89</text:p>
          </table:table-cell>
          <table:table-cell table:style-name="ce20" table:formula="of:=+[.F20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84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1]*[.D21]" office:value-type="float" office:value="47.1646388888889" calcext:value-type="float">
            <text:p>47.16</text:p>
          </table:table-cell>
          <table:table-cell table:style-name="ce20" table:formula="of:=+[.F21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22" office:value-type="float" office:value="0.0184" calcext:value-type="float">
            <text:p>0.0184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22]*[.D22]" office:value-type="float" office:value="0.92" calcext:value-type="float">
            <text:p>0.92</text:p>
          </table:table-cell>
          <table:table-cell table:style-name="ce22" table:formula="of:=+[.F22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22" table:number-columns-repeated="5"/>
          <table:table-cell table:style-name="ce22" table:formula="of:=+[.F23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<text:s/>Mano de Obra Directa</text:p>
          </table:table-cell>
          <table:table-cell table:style-name="ce174" table:number-columns-repeated="3"/>
          <table:table-cell table:style-name="ce174" office:value-type="float" office:value="5000" calcext:value-type="float">
            <text:p>5000</text:p>
          </table:table-cell>
          <table:table-cell table:style-name="ce174" table:formula="of:=+[.F24]" office:value-type="float" office:value="5000" calcext:value-type="float">
            <text:p>500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A</text:p>
          </table:table-cell>
          <table:table-cell table:style-name="ce22" table:number-columns-repeated="3"/>
          <table:table-cell table:style-name="ce173" table:formula="of:=+[.F26]" office:value-type="float" office:value="1250" calcext:value-type="float">
            <text:p>1250</text:p>
          </table:table-cell>
          <table:table-cell table:style-name="ce22" table:formula="of:=+[.F25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5" table:formula="of:=+[$Resumen.C16]" office:value-type="float" office:value="25" calcext:value-type="float">
            <text:p>25.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26]*[.D26]" office:value-type="float" office:value="1250" calcext:value-type="float">
            <text:p>1250</text:p>
          </table:table-cell>
          <table:table-cell table:style-name="ce22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B</text:p>
          </table:table-cell>
          <table:table-cell table:style-name="ce22" table:number-columns-repeated="3"/>
          <table:table-cell table:style-name="ce185" table:formula="of:=+[.F28]" office:value-type="float" office:value="1111.11111111111" calcext:value-type="float">
            <text:p>1111.11</text:p>
          </table:table-cell>
          <table:table-cell table:style-name="ce20" table:formula="of:=+[.F27]" office:value-type="float" office:value="1111.11111111111" calcext:value-type="float">
            <text:p>1111.11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1" table:formula="of:=+[$Resumen.C17]" office:value-type="float" office:value="22.2222222222222" calcext:value-type="float">
            <text:p>22.2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8]*[.D28]" office:value-type="float" office:value="1111.11111111111" calcext:value-type="float">
            <text:p>1111.11</text:p>
          </table:table-cell>
          <table:table-cell table:style-name="ce20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C</text:p>
          </table:table-cell>
          <table:table-cell table:style-name="ce20"/>
          <table:table-cell table:style-name="ce22" table:number-columns-repeated="2"/>
          <table:table-cell table:style-name="ce185" table:formula="of:=+[.F30]" office:value-type="float" office:value="902.77777777778" calcext:value-type="float">
            <text:p>902.78</text:p>
          </table:table-cell>
          <table:table-cell table:style-name="ce20" table:formula="of:=+[.F29]" office:value-type="float" office:value="902.77777777778" calcext:value-type="float">
            <text:p>902.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1" table:formula="of:=+[$Resumen.C18]" office:value-type="float" office:value="18.0555555555556" calcext:value-type="float">
            <text:p>18.06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30]*[.D30]" office:value-type="float" office:value="902.77777777778" calcext:value-type="float">
            <text:p>902.78</text:p>
          </table:table-cell>
          <table:table-cell table:style-name="ce20"/>
          <table:table-cell table:number-columns-repeated="16377"/>
        </table:table-row>
        <table:table-row table:style-name="ro1">
          <table:table-cell/>
          <table:table-cell table:style-name="ce22"/>
          <table:table-cell table:style-name="ce20"/>
          <table:table-cell table:style-name="ce22" table:number-columns-repeated="4"/>
          <table:table-cell table:number-columns-repeated="16377"/>
        </table:table-row>
        <table:table-row table:style-name="ro1">
          <table:table-cell/>
          <table:table-cell table:style-name="ce173" office:value-type="string" calcext:value-type="string">
            <text:p>TOTAL COSTOS DE PRODUCCION</text:p>
          </table:table-cell>
          <table:table-cell table:style-name="ce185" office:value-type="float" office:value="251.944444444444" calcext:value-type="float">
            <text:p>251.94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85" table:formula="of:=+[.F24]+[.F7]" office:value-type="float" office:value="12634.9205833333" calcext:value-type="float">
            <text:p>12634.92</text:p>
          </table:table-cell>
          <table:table-cell table:style-name="ce185" table:formula="of:=+[.G24]+[.G7]" office:value-type="float" office:value="12634.9205833333" calcext:value-type="float">
            <text:p>12634.9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70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181"/>
          <table:table-cell table:number-columns-repeated="16377"/>
        </table:table-row>
        <table:table-row table:style-name="ro8">
          <table:table-cell/>
          <table:table-cell table:style-name="ce175" table:number-columns-repeated="5"/>
          <table:table-cell table:style-name="ce201"/>
          <table:table-cell table:number-columns-repeated="16377"/>
        </table:table-row>
        <table:table-row table:style-name="ro1">
          <table:table-cell/>
          <table:table-cell table:style-name="ce176" office:value-type="string" calcext:value-type="string">
            <text:p>DESCRIPCION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7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77" office:value-type="string" calcext:value-type="string">
            <text:p>A. COSTOS DE PRODUCCION</text:p>
          </table:table-cell>
          <table:table-cell table:style-name="ce187" table:number-columns-repeated="2"/>
          <table:table-cell table:style-name="ce192"/>
          <table:table-cell table:style-name="ce198"/>
          <table:table-cell table:style-name="ce203"/>
          <table:table-cell table:number-columns-repeated="16377"/>
        </table:table-row>
        <table:table-row table:style-name="ro1">
          <table:table-cell/>
          <table:table-cell table:style-name="ce178" office:value-type="string" calcext:value-type="string">
            <text:p><text:s/>Materia prima <text:s/>e insumos</text:p>
          </table:table-cell>
          <table:table-cell table:style-name="ce188" table:formula="of:=+[.C8]*[$'Presupuesto de ventas'.O8]+[.C13]*[$'Presupuesto de ventas'.O9]+[$'Costo de producción'.C18]*[$'Presupuesto de ventas'.O10]" office:value-type="float" office:value="91619.047" calcext:value-type="float">
            <text:p>91,619.05 <text:s text:c="2"/></text:p>
          </table:table-cell>
          <table:table-cell table:style-name="ce189" table:formula="of:=+[.C8]*[$'Presupuesto de ventas'.O12]+[.C13]*[$'Presupuesto de ventas'.O13]+[$'Costo de producción'.C18]*[$'Presupuesto de ventas'.O14]" office:value-type="float" office:value="94800.9352333333" calcext:value-type="float">
            <text:p>94,800.94</text:p>
          </table:table-cell>
          <table:table-cell table:style-name="ce193" table:formula="of:=+[.C8]*[$'Presupuesto de ventas'.O16]+[.C13]*[$'Presupuesto de ventas'.O17]+[$'Costo de producción'.C18]*[$'Presupuesto de ventas'.O18]" office:value-type="float" office:value="99487.6044066667" calcext:value-type="float">
            <text:p>99,487.60</text:p>
          </table:table-cell>
          <table:table-cell table:style-name="ce199" table:number-columns-repeated="2"/>
          <table:table-cell table:number-columns-repeated="16377"/>
        </table:table-row>
        <table:table-row table:style-name="ro1">
          <table:table-cell/>
          <table:table-cell table:style-name="ce179" office:value-type="string" calcext:value-type="string">
            <text:p><text:s/>Mano de Obra</text:p>
          </table:table-cell>
          <table:table-cell table:style-name="ce189" table:formula="of:=+[$Resumen.C16]*[$'Presupuesto de ventas'.O8]+[$Resumen.C17]*[$'Presupuesto de ventas'.O9]+[$Resumen.C18]*[$'Presupuesto de ventas'.O10]" office:value-type="float" office:value="39166.6666666667" calcext:value-type="float">
            <text:p>39,166.67</text:p>
          </table:table-cell>
          <table:table-cell table:style-name="ce189" table:formula="of:=+[$Resumen.C16]*[$'Presupuesto de ventas'.O12]+[$Resumen.C17]*[$'Presupuesto de ventas'.O13]+[$Resumen.C18]*[$'Presupuesto de ventas'.O14]" office:value-type="float" office:value="40516.6666666667" calcext:value-type="float">
            <text:p>40,516.67</text:p>
          </table:table-cell>
          <table:table-cell table:style-name="ce193" table:formula="of:=+[$Resumen.C16]*[$'Presupuesto de ventas'.O16]+[$Resumen.C17]*[$'Presupuesto de ventas'.O17]+[$Resumen.C18]*[$'Presupuesto de ventas'.O18]" office:value-type="float" office:value="42566.6666666667" calcext:value-type="float">
            <text:p>42,566.67</text:p>
          </table:table-cell>
          <table:table-cell table:style-name="ce199" table:number-columns-repeated="2"/>
          <table:table-cell table:number-columns-repeated="16377"/>
        </table:table-row>
        <table:table-row table:style-name="ro1">
          <table:table-cell/>
          <table:table-cell table:style-name="ce180" office:value-type="string" calcext:value-type="string">
            <text:p>TOTAL COSTOS DE PRODUCCION</text:p>
          </table:table-cell>
          <table:table-cell table:style-name="ce190" table:formula="of:=SUM([.C39:.C40])" office:value-type="float" office:value="130785.713666667" calcext:value-type="float">
            <text:p>130,785.71</text:p>
          </table:table-cell>
          <table:table-cell table:style-name="ce190" table:formula="of:=SUM([.D39:.D40])" office:value-type="float" office:value="135317.6019" calcext:value-type="float">
            <text:p>135,317.60</text:p>
          </table:table-cell>
          <table:table-cell table:style-name="ce194" table:formula="of:=SUM([.E39:.E40])" office:value-type="float" office:value="142054.271073333" calcext:value-type="float">
            <text:p>142,054.27</text:p>
          </table:table-cell>
          <table:table-cell table:style-name="ce199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200" table:number-columns-repeated="2"/>
          <table:table-cell table:number-columns-repeated="16377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eldos" table:style-name="ta9"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default-cell-style-name="ce99"/>
        <table:table-column table:style-name="co25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5" table:number-columns-repeated="2" table:default-cell-style-name="ce204"/>
        <table:table-column table:style-name="co27" table:default-cell-style-name="ce204"/>
        <table:table-column table:style-name="co28" table:default-cell-style-name="ce204"/>
        <table:table-column table:style-name="co16" table:number-columns-repeated="2" table:default-cell-style-name="ce204"/>
        <table:table-column table:style-name="co29" table:number-columns-repeated="245" table:default-cell-style-name="ce204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70" office:value-type="string" calcext:value-type="string" table:number-columns-spanned="8" table:number-rows-spanned="1">
            <text:p>PRESUPUESTO ANUAL DE <text:s/>REMUNERACIONES EN DOLARES</text:p>
          </table:table-cell>
          <table:covered-table-cell table:number-columns-repeated="7" table:style-name="ce18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9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98"/>
          <table:table-cell table:number-columns-repeated="16375"/>
        </table:table-row>
        <table:table-row table:style-name="ro1">
          <table:table-cell/>
          <table:table-cell table:style-name="ce90" table:number-columns-repeated="8"/>
          <table:table-cell table:number-columns-repeated="16375"/>
        </table:table-row>
        <table:table-row table:style-name="ro1">
          <table:table-cell/>
          <table:table-cell table:style-name="ce205" office:value-type="string" calcext:value-type="string">
            <text:p>Cargo</text:p>
          </table:table-cell>
          <table:table-cell table:style-name="ce205" office:value-type="string" calcext:value-type="string">
            <text:p>Básico mes</text:p>
          </table:table-cell>
          <table:table-cell table:style-name="ce205" office:value-type="string" calcext:value-type="string">
            <text:p>Anual</text:p>
          </table:table-cell>
          <table:table-cell table:style-name="ce205" office:value-type="string" calcext:value-type="string">
            <text:p>Beneficios(*)</text:p>
          </table:table-cell>
          <table:table-cell table:style-name="ce205" office:value-type="string" calcext:value-type="string">
            <text:p>N° Trab.</text:p>
          </table:table-cell>
          <table:table-cell table:style-name="ce205" office:value-type="string" calcext:value-type="string">
            <text:p>Sub Total</text:p>
          </table:table-cell>
          <table:table-cell table:style-name="ce205" office:value-type="string" calcext:value-type="string">
            <text:p>Essalud (***)</text:p>
          </table:table-cell>
          <table:table-cell table:style-name="ce238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206" office:value-type="string" calcext:value-type="string">
            <text:p>Area de Administración</text:p>
          </table:table-cell>
          <table:table-cell table:style-name="ce216" table:formula="of:=SUM([.C9:.C11])" office:value-type="float" office:value="1888.88888888889" calcext:value-type="float">
            <text:p>1888.9</text:p>
          </table:table-cell>
          <table:table-cell table:style-name="ce216" table:formula="of:=SUM([.D9:.D11])" office:value-type="float" office:value="22666.6666666667" calcext:value-type="float">
            <text:p>22666.7</text:p>
          </table:table-cell>
          <table:table-cell table:style-name="ce216" table:formula="of:=SUM([.E9:.E11])" office:value-type="float" office:value="2833.33333333333" calcext:value-type="float">
            <text:p>2833.3</text:p>
          </table:table-cell>
          <table:table-cell table:style-name="ce232" table:formula="of:=SUM([.F9:.F11])" office:value-type="float" office:value="3" calcext:value-type="float">
            <text:p>3</text:p>
          </table:table-cell>
          <table:table-cell table:style-name="ce232" table:formula="of:=SUM([.G9:.G11])" office:value-type="float" office:value="25500" calcext:value-type="float">
            <text:p>25500</text:p>
          </table:table-cell>
          <table:table-cell table:style-name="ce232" table:formula="of:=SUM([.H9:.H11])" office:value-type="float" office:value="2040" calcext:value-type="float">
            <text:p>2040</text:p>
          </table:table-cell>
          <table:table-cell table:style-name="ce232" table:formula="of:=SUM([.I9:.I11])" office:value-type="float" office:value="27540" calcext:value-type="float">
            <text:p>27540</text:p>
          </table:table-cell>
          <table:table-cell table:number-columns-repeated="16375"/>
        </table:table-row>
        <table:table-row table:style-name="ro1">
          <table:table-cell/>
          <table:table-cell table:style-name="ce207" office:value-type="string" calcext:value-type="string">
            <text:p>Gerente General</text:p>
          </table:table-cell>
          <table:table-cell table:style-name="ce217" table:formula="of:=3000/[$Resumen.C20]" office:value-type="float" office:value="833.333333333333" calcext:value-type="float">
            <text:p>833.33</text:p>
          </table:table-cell>
          <table:table-cell table:style-name="ce217" table:formula="of:=[.C9]*12" office:value-type="float" office:value="10000" calcext:value-type="float">
            <text:p>10000.00</text:p>
          </table:table-cell>
          <table:table-cell table:style-name="ce217" table:formula="of:=([.C9]/2)+([.C9]/2)+([.C9]/2)" office:value-type="float" office:value="1250" calcext:value-type="float">
            <text:p>1250.00</text:p>
          </table:table-cell>
          <table:table-cell table:style-name="ce233" office:value-type="float" office:value="1" calcext:value-type="float">
            <text:p>1</text:p>
          </table:table-cell>
          <table:table-cell table:style-name="ce233" table:formula="of:=([.D9]+[.E9])*[.F9]" office:value-type="float" office:value="11250" calcext:value-type="float">
            <text:p>11250</text:p>
          </table:table-cell>
          <table:table-cell table:style-name="ce233" table:formula="of:=([.C9]*9%)*12" office:value-type="float" office:value="900" calcext:value-type="float">
            <text:p>900</text:p>
          </table:table-cell>
          <table:table-cell table:style-name="ce239" table:formula="of:=SUM([.G9:.H9])" office:value-type="float" office:value="12150" calcext:value-type="float">
            <text:p>12150</text:p>
          </table:table-cell>
          <table:table-cell table:number-columns-repeated="16375"/>
        </table:table-row>
        <table:table-row table:style-name="ro1">
          <table:table-cell/>
          <table:table-cell table:style-name="ce207" office:value-type="string" calcext:value-type="string">
            <text:p>Sub gerente de Logística</text:p>
          </table:table-cell>
          <table:table-cell table:style-name="ce217" table:formula="of:=2000/[$Resumen.C20]" office:value-type="float" office:value="555.555555555556" calcext:value-type="float">
            <text:p>555.56</text:p>
          </table:table-cell>
          <table:table-cell table:style-name="ce217" table:formula="of:=[.C10]*12" office:value-type="float" office:value="6666.66666666667" calcext:value-type="float">
            <text:p>6666.67</text:p>
          </table:table-cell>
          <table:table-cell table:style-name="ce217" table:formula="of:=([.C10]/2)+([.C10]/2)+([.C10]/2)" office:value-type="float" office:value="833.333333333333" calcext:value-type="float">
            <text:p>833.33</text:p>
          </table:table-cell>
          <table:table-cell table:style-name="ce233" office:value-type="float" office:value="1" calcext:value-type="float">
            <text:p>1</text:p>
          </table:table-cell>
          <table:table-cell table:style-name="ce233" table:formula="of:=([.D10]+[.E10])*[.F10]" office:value-type="float" office:value="7500" calcext:value-type="float">
            <text:p>7500</text:p>
          </table:table-cell>
          <table:table-cell table:style-name="ce233" table:formula="of:=([.C10]*9%)*12" office:value-type="float" office:value="600" calcext:value-type="float">
            <text:p>600</text:p>
          </table:table-cell>
          <table:table-cell table:style-name="ce239" table:formula="of:=SUM([.G10:.H10])" office:value-type="float" office:value="8100" calcext:value-type="float">
            <text:p>8100</text:p>
          </table:table-cell>
          <table:table-cell table:number-columns-repeated="16375"/>
        </table:table-row>
        <table:table-row table:style-name="ro1">
          <table:table-cell/>
          <table:table-cell table:style-name="ce208" office:value-type="string" calcext:value-type="string">
            <text:p>Diseñador y control de calidad</text:p>
          </table:table-cell>
          <table:table-cell table:style-name="ce217" table:formula="of:=1800/[$Resumen.C20]" office:value-type="float" office:value="500" calcext:value-type="float">
            <text:p>500.00</text:p>
          </table:table-cell>
          <table:table-cell table:style-name="ce217" table:formula="of:=[.C11]*12" office:value-type="float" office:value="6000" calcext:value-type="float">
            <text:p>6000.00</text:p>
          </table:table-cell>
          <table:table-cell table:style-name="ce217" table:formula="of:=([.C11]/2)+([.C11]/2)+([.C11]/2)" office:value-type="float" office:value="750" calcext:value-type="float">
            <text:p>750.00</text:p>
          </table:table-cell>
          <table:table-cell table:style-name="ce233" office:value-type="float" office:value="1" calcext:value-type="float">
            <text:p>1</text:p>
          </table:table-cell>
          <table:table-cell table:style-name="ce233" table:formula="of:=([.D11]+[.E11])*[.F11]" office:value-type="float" office:value="6750" calcext:value-type="float">
            <text:p>6750</text:p>
          </table:table-cell>
          <table:table-cell table:style-name="ce233" table:formula="of:=([.C11]*9%)*12" office:value-type="float" office:value="540" calcext:value-type="float">
            <text:p>540</text:p>
          </table:table-cell>
          <table:table-cell table:style-name="ce239" table:formula="of:=SUM([.G11:.H11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206" office:value-type="string" calcext:value-type="string">
            <text:p>Area de Ventas</text:p>
          </table:table-cell>
          <table:table-cell table:style-name="ce218" table:formula="of:=SUM([.C13:.C13])" office:value-type="float" office:value="500" calcext:value-type="float">
            <text:p>500.00</text:p>
          </table:table-cell>
          <table:table-cell table:style-name="ce218" table:formula="of:=SUM([.D13:.D13])" office:value-type="float" office:value="6000" calcext:value-type="float">
            <text:p>6000.00</text:p>
          </table:table-cell>
          <table:table-cell table:style-name="ce218" table:formula="of:=SUM([.E13:.E13])" office:value-type="float" office:value="750" calcext:value-type="float">
            <text:p>750.00</text:p>
          </table:table-cell>
          <table:table-cell table:style-name="ce232" table:formula="of:=SUM([.F13:.F13])" office:value-type="float" office:value="1" calcext:value-type="float">
            <text:p>1</text:p>
          </table:table-cell>
          <table:table-cell table:style-name="ce232" table:formula="of:=SUM([.G13:.G13])" office:value-type="float" office:value="6750" calcext:value-type="float">
            <text:p>6750</text:p>
          </table:table-cell>
          <table:table-cell table:style-name="ce232" table:formula="of:=SUM([.H13:.H13])" office:value-type="float" office:value="540" calcext:value-type="float">
            <text:p>540</text:p>
          </table:table-cell>
          <table:table-cell table:style-name="ce240" table:formula="of:=SUM([.I13:.I13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207" office:value-type="string" calcext:value-type="string">
            <text:p>Sub Gerente de Ventas y Marketing</text:p>
          </table:table-cell>
          <table:table-cell table:style-name="ce217" table:formula="of:=1800/[$Resumen.C20]" office:value-type="float" office:value="500" calcext:value-type="float">
            <text:p>500.00</text:p>
          </table:table-cell>
          <table:table-cell table:style-name="ce217" table:formula="of:=[.C13]*12" office:value-type="float" office:value="6000" calcext:value-type="float">
            <text:p>6000.00</text:p>
          </table:table-cell>
          <table:table-cell table:style-name="ce217" table:formula="of:=([.C13]/2)+([.C13]/2)+([.C13]/2)" office:value-type="float" office:value="750" calcext:value-type="float">
            <text:p>750.00</text:p>
          </table:table-cell>
          <table:table-cell table:style-name="ce233" office:value-type="float" office:value="1" calcext:value-type="float">
            <text:p>1</text:p>
          </table:table-cell>
          <table:table-cell table:style-name="ce233" table:formula="of:=([.D13]+[.E13])*[.F13]" office:value-type="float" office:value="6750" calcext:value-type="float">
            <text:p>6750</text:p>
          </table:table-cell>
          <table:table-cell table:style-name="ce233" table:formula="of:=([.C13]*9%)*12" office:value-type="float" office:value="540" calcext:value-type="float">
            <text:p>540</text:p>
          </table:table-cell>
          <table:table-cell table:style-name="ce239" table:formula="of:=SUM([.G13:.H13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219" table:formula="of:=+[.C8]+[.C12]" office:value-type="float" office:value="2388.88888888889" calcext:value-type="float">
            <text:p>2388.89</text:p>
          </table:table-cell>
          <table:table-cell table:style-name="ce219" table:formula="of:=+[.D8]+[.D12]" office:value-type="float" office:value="28666.6666666667" calcext:value-type="float">
            <text:p>28666.67</text:p>
          </table:table-cell>
          <table:table-cell table:style-name="ce219" table:formula="of:=+[.E8]+[.E12]" office:value-type="float" office:value="3583.33333333333" calcext:value-type="float">
            <text:p>3583.33</text:p>
          </table:table-cell>
          <table:table-cell table:style-name="ce205" table:formula="of:=+[.F8]+[.F12]" office:value-type="float" office:value="4" calcext:value-type="float">
            <text:p>4</text:p>
          </table:table-cell>
          <table:table-cell table:style-name="ce205" table:formula="of:=+[.G8]+[.G12]" office:value-type="float" office:value="32250" calcext:value-type="float">
            <text:p>32250</text:p>
          </table:table-cell>
          <table:table-cell table:style-name="ce205" table:formula="of:=+[.H8]+[.H12]" office:value-type="float" office:value="2580" calcext:value-type="float">
            <text:p>2580</text:p>
          </table:table-cell>
          <table:table-cell table:style-name="ce205" table:formula="of:=+[.I8]+[.I12]" office:value-type="float" office:value="34830" calcext:value-type="float">
            <text:p>34830</text:p>
          </table:table-cell>
          <table:table-cell table:number-columns-repeated="16375"/>
        </table:table-row>
        <table:table-row table:style-name="ro1">
          <table:table-cell/>
          <table:table-cell table:style-name="ce209" office:value-type="string" calcext:value-type="string">
            <text:p>(*) Gratificación Medio sueldo en julio y diciembre + Medio sueldo CTS (1.5 sueldo)</text:p>
          </table:table-cell>
          <table:table-cell table:style-name="ce90" table:number-columns-repeated="7"/>
          <table:table-cell table:number-columns-repeated="16375"/>
        </table:table-row>
        <table:table-row table:style-name="ro1">
          <table:table-cell/>
          <table:table-cell table:style-name="ce209" office:value-type="string" calcext:value-type="string">
            <text:p>(***) Aporte patronal 9%</text:p>
          </table:table-cell>
          <table:table-cell table:style-name="ce90" table:number-columns-repeated="7"/>
          <table:table-cell table:number-columns-repeated="16375"/>
        </table:table-row>
        <table:table-row table:style-name="ro1">
          <table:table-cell/>
          <table:table-cell table:style-name="ce210"/>
          <table:table-cell table:style-name="ce220" table:number-columns-spanned="9" table:number-rows-spanned="1"/>
          <table:covered-table-cell table:number-columns-repeated="8" table:style-name="ce229"/>
          <table:table-cell table:number-columns-repeated="16373"/>
        </table:table-row>
        <table:table-row table:style-name="ro1">
          <table:table-cell/>
          <table:table-cell table:style-name="ce211" office:value-type="string" calcext:value-type="string" table:number-columns-spanned="6" table:number-rows-spanned="1">
            <text:p>PRESUPUESTO DE REMUNERACIONES <text:s/>PROYECTADO</text:p>
          </table:table-cell>
          <table:covered-table-cell table:number-columns-repeated="5" table:style-name="ce221"/>
          <table:table-cell table:style-name="ce229" table:number-columns-repeated="4"/>
          <table:table-cell table:number-columns-repeated="16373"/>
        </table:table-row>
        <table:table-row table:style-name="ro1">
          <table:table-cell/>
          <table:table-cell table:style-name="ce210"/>
          <table:table-cell table:style-name="ce222" table:number-columns-repeated="7"/>
          <table:table-cell table:style-name="ce90" table:number-columns-repeated="2"/>
          <table:table-cell table:number-columns-repeated="16373"/>
        </table:table-row>
        <table:table-row table:style-name="ro1">
          <table:table-cell/>
          <table:table-cell table:style-name="ce212" office:value-type="string" calcext:value-type="string" table:number-columns-spanned="1" table:number-rows-spanned="2">
            <text:p>AREAS</text:p>
          </table:table-cell>
          <table:table-cell table:style-name="ce223" office:value-type="string" calcext:value-type="string" table:number-columns-spanned="5" table:number-rows-spanned="1">
            <text:p>PERIODOS</text:p>
          </table:table-cell>
          <table:covered-table-cell table:number-columns-repeated="3" table:style-name="ce230"/>
          <table:covered-table-cell table:style-name="ce223"/>
          <table:table-cell table:style-name="ce235"/>
          <table:table-cell table:style-name="ce241" table:number-columns-repeated="3"/>
          <table:table-cell table:number-columns-repeated="16373"/>
        </table:table-row>
        <table:table-row table:style-name="ro9">
          <table:table-cell/>
          <table:covered-table-cell table:style-name="ce213"/>
          <table:table-cell table:style-name="ce224" office:value-type="float" office:value="1" calcext:value-type="float">
            <text:p>1</text:p>
          </table:table-cell>
          <table:table-cell table:style-name="ce231" table:formula="of:=[.C21]+1" office:value-type="float" office:value="2" calcext:value-type="float">
            <text:p>2</text:p>
          </table:table-cell>
          <table:table-cell table:style-name="ce231" table:formula="of:=[.D21]+1" office:value-type="float" office:value="3" calcext:value-type="float">
            <text:p>3</text:p>
          </table:table-cell>
          <table:table-cell table:style-name="ce231"/>
          <table:table-cell table:style-name="ce234"/>
          <table:table-cell table:style-name="ce236"/>
          <table:table-cell table:style-name="ce242" table:number-columns-repeated="3"/>
          <table:table-cell table:number-columns-repeated="16373"/>
        </table:table-row>
        <table:table-row table:style-name="ro1">
          <table:table-cell/>
          <table:table-cell table:style-name="ce214" office:value-type="string" calcext:value-type="string">
            <text:p>ADMINISTRACION</text:p>
          </table:table-cell>
          <table:table-cell table:style-name="ce225" table:formula="of:=[.$I$8]" office:value-type="float" office:value="27540" calcext:value-type="float">
            <text:p>27,540.00</text:p>
          </table:table-cell>
          <table:table-cell table:style-name="ce225" table:formula="of:=[.$I$8]" office:value-type="float" office:value="27540" calcext:value-type="float">
            <text:p>27,540.00</text:p>
          </table:table-cell>
          <table:table-cell table:style-name="ce225" table:formula="of:=[.$I$8]" office:value-type="float" office:value="27540" calcext:value-type="float">
            <text:p>27,540.00</text:p>
          </table:table-cell>
          <table:table-cell table:style-name="ce225" table:number-columns-repeated="2"/>
          <table:table-cell table:style-name="ce237"/>
          <table:table-cell table:style-name="ce243" table:number-columns-repeated="3"/>
          <table:table-cell table:number-columns-repeated="16373"/>
        </table:table-row>
        <table:table-row table:style-name="ro1">
          <table:table-cell/>
          <table:table-cell table:style-name="ce215" office:value-type="string" calcext:value-type="string">
            <text:p>VENTAS</text:p>
          </table:table-cell>
          <table:table-cell table:style-name="ce226" table:formula="of:=[.$I$12]" office:value-type="float" office:value="7290" calcext:value-type="float">
            <text:p>7,290.00</text:p>
          </table:table-cell>
          <table:table-cell table:style-name="ce226" table:formula="of:=[.$I$12]" office:value-type="float" office:value="7290" calcext:value-type="float">
            <text:p>7,290.00</text:p>
          </table:table-cell>
          <table:table-cell table:style-name="ce226" table:formula="of:=[.$I$12]" office:value-type="float" office:value="7290" calcext:value-type="float">
            <text:p>7,290.00</text:p>
          </table:table-cell>
          <table:table-cell table:style-name="ce226" table:number-columns-repeated="2"/>
          <table:table-cell table:style-name="ce237"/>
          <table:table-cell table:style-name="ce243" table:number-columns-repeated="3"/>
          <table:table-cell table:number-columns-repeated="16373"/>
        </table:table-row>
        <table:table-row table:style-name="ro1">
          <table:table-cell/>
          <table:table-cell table:style-name="ce176" office:value-type="string" calcext:value-type="string">
            <text:p>TOTAL</text:p>
          </table:table-cell>
          <table:table-cell table:style-name="ce227" table:formula="of:=SUM([.C22:.C23])" office:value-type="float" office:value="34830" calcext:value-type="float">
            <text:p>34,830.00</text:p>
          </table:table-cell>
          <table:table-cell table:style-name="ce227" table:formula="of:=SUM([.D22:.D23])" office:value-type="float" office:value="34830" calcext:value-type="float">
            <text:p>34,830.00</text:p>
          </table:table-cell>
          <table:table-cell table:style-name="ce227" table:formula="of:=SUM([.E22:.E23])" office:value-type="float" office:value="34830" calcext:value-type="float">
            <text:p>34,830.00</text:p>
          </table:table-cell>
          <table:table-cell table:style-name="ce227" table:number-columns-repeated="2"/>
          <table:table-cell table:style-name="ce235"/>
          <table:table-cell table:style-name="ce244" table:number-columns-repeated="3"/>
          <table:table-cell table:number-columns-repeated="16373"/>
        </table:table-row>
        <table:table-row table:style-name="ro1">
          <table:table-cell/>
          <table:table-cell table:style-name="ce210"/>
          <table:table-cell table:style-name="ce228"/>
          <table:table-cell table:style-name="ce222" table:number-columns-repeated="6"/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operativos" table:style-name="ta10">
        <table:table-column table:style-name="co29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7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24" table:default-cell-style-name="ce204"/>
        <table:table-column table:style-name="co36" table:default-cell-style-name="ce204"/>
        <table:table-column table:style-name="co37" table:default-cell-style-name="ce204"/>
        <table:table-column table:style-name="co29" table:number-columns-repeated="246" table:default-cell-style-name="ce204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70" table:number-columns-spanned="6" table:number-rows-spanned="1"/>
          <table:covered-table-cell table:number-columns-repeated="5" table:style-name="ce181"/>
          <table:table-cell table:number-columns-repeated="16376"/>
        </table:table-row>
        <table:table-row table:style-name="ro1">
          <table:table-cell table:number-columns-repeated="2"/>
          <table:table-cell table:style-name="ce170" office:value-type="string" calcext:value-type="string" table:number-columns-spanned="6" table:number-rows-spanned="1">
            <text:p>GASTOS OPERATIVOS MENSUAL</text:p>
          </table:table-cell>
          <table:covered-table-cell table:number-columns-repeated="5" table:style-name="ce18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1" table:number-rows-spanned="2">
            <text:p>RUBRO</text:p>
          </table:table-cell>
          <table:table-cell table:style-name="ce263" office:value-type="string" calcext:value-type="string" table:number-columns-spanned="1" table:number-rows-spanned="2">
            <text:p>COSTO UNITARIO</text:p>
          </table:table-cell>
          <table:table-cell table:style-name="ce263" office:value-type="string" calcext:value-type="string" table:number-columns-spanned="1" table:number-rows-spanned="2">
            <text:p>UNIDADES REQUERIDAS</text:p>
          </table:table-cell>
          <table:table-cell table:style-name="ce287" office:value-type="string" calcext:value-type="string" table:number-columns-spanned="2" table:number-rows-spanned="1">
            <text:p>COSTO </text:p>
          </table:table-cell>
          <table:covered-table-cell table:style-name="ce287"/>
          <table:table-cell table:style-name="ce191" office:value-type="string" calcext:value-type="string" table:number-columns-spanned="1" table:number-rows-spanned="2">
            <text:p>TOTAL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 table:style-name="ce245"/>
          <table:covered-table-cell table:number-columns-repeated="2" table:style-name="ce264"/>
          <table:table-cell table:style-name="ce288" office:value-type="string" calcext:value-type="string">
            <text:p>FIJO</text:p>
          </table:table-cell>
          <table:table-cell table:style-name="ce288" office:value-type="string" calcext:value-type="string">
            <text:p>VARIABLE</text:p>
          </table:table-cell>
          <table:covered-table-cell table:style-name="ce304"/>
          <table:table-cell table:number-columns-repeated="16376"/>
        </table:table-row>
        <table:table-row table:style-name="ro1">
          <table:table-cell table:number-columns-repeated="2"/>
          <table:table-cell table:style-name="ce246" office:value-type="string" calcext:value-type="string">
            <text:p>GASTOS DE ADMINISTRACION</text:p>
          </table:table-cell>
          <table:table-cell table:style-name="ce265" table:number-columns-repeated="4"/>
          <table:table-cell table:style-name="ce305"/>
          <table:table-cell table:number-columns-repeated="16376"/>
        </table:table-row>
        <table:table-row table:style-name="ro1">
          <table:table-cell table:number-columns-repeated="2"/>
          <table:table-cell table:style-name="ce247" office:value-type="string" calcext:value-type="string">
            <text:p>Sueldos del personal</text:p>
          </table:table-cell>
          <table:table-cell table:style-name="ce266" table:formula="of:=[$Sueldos.I8]/12" office:value-type="float" office:value="2295" calcext:value-type="float">
            <text:p>2,295</text:p>
          </table:table-cell>
          <table:table-cell table:style-name="ce266"/>
          <table:table-cell table:style-name="ce289" table:formula="of:=[.D8]" office:value-type="float" office:value="2295" calcext:value-type="float">
            <text:p>2,295.00</text:p>
          </table:table-cell>
          <table:table-cell table:style-name="ce289"/>
          <table:table-cell table:style-name="ce306" table:formula="of:=[.F8]+[.G8]" office:value-type="float" office:value="2295" calcext:value-type="float">
            <text:p>2,295.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7" office:value-type="string" calcext:value-type="string">
            <text:p>Alquiler de local</text:p>
          </table:table-cell>
          <table:table-cell table:style-name="ce266" table:formula="of:=1500/[$Resumen.C20]" office:value-type="float" office:value="416.666666666667" calcext:value-type="float">
            <text:p>417</text:p>
          </table:table-cell>
          <table:table-cell table:style-name="ce266" office:value-type="float" office:value="1" calcext:value-type="float">
            <text:p>1</text:p>
          </table:table-cell>
          <table:table-cell table:style-name="ce289" table:formula="of:=[.D9]" office:value-type="float" office:value="416.666666666667" calcext:value-type="float">
            <text:p>416.67</text:p>
          </table:table-cell>
          <table:table-cell table:style-name="ce289"/>
          <table:table-cell table:style-name="ce307" table:formula="of:=[.F9]" office:value-type="float" office:value="416.666666666667" calcext:value-type="float">
            <text:p>416.6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" office:value-type="string" calcext:value-type="string">
            <text:p>Servicios: Agua, luz, telefono e internet</text:p>
          </table:table-cell>
          <table:table-cell table:style-name="ce189" office:value-type="float" office:value="66.1111111111111" calcext:value-type="float">
            <text:p>66.11</text:p>
          </table:table-cell>
          <table:table-cell table:style-name="ce269" office:value-type="float" office:value="1" calcext:value-type="float">
            <text:p>1</text:p>
          </table:table-cell>
          <table:table-cell table:style-name="ce189" table:formula="of:=[.D10]" office:value-type="float" office:value="66.1111111111111" calcext:value-type="float">
            <text:p>66.11</text:p>
          </table:table-cell>
          <table:table-cell table:style-name="ce189"/>
          <table:table-cell table:style-name="ce307" table:formula="of:=[.F10]+[.G10]" office:value-type="float" office:value="66.1111111111111" calcext:value-type="float">
            <text:p>66.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" office:value-type="string" calcext:value-type="string">
            <text:p>Mantenimiento y reparaciones.</text:p>
          </table:table-cell>
          <table:table-cell table:style-name="ce189" office:value-type="float" office:value="22.2222222222222" calcext:value-type="float">
            <text:p>22.22</text:p>
          </table:table-cell>
          <table:table-cell table:style-name="ce269" office:value-type="float" office:value="1" calcext:value-type="float">
            <text:p>1</text:p>
          </table:table-cell>
          <table:table-cell table:style-name="ce189"/>
          <table:table-cell table:style-name="ce189" table:formula="of:=[.D11]" office:value-type="float" office:value="22.2222222222222" calcext:value-type="float">
            <text:p>22.22</text:p>
          </table:table-cell>
          <table:table-cell table:style-name="ce307" table:formula="of:=[.F11]+[.G11]" office:value-type="float" office:value="22.2222222222222" calcext:value-type="float">
            <text:p>22.2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" office:value-type="string" calcext:value-type="string">
            <text:p>Utiles de oficina</text:p>
          </table:table-cell>
          <table:table-cell table:style-name="ce189" office:value-type="float" office:value="8.33333333333333" calcext:value-type="float">
            <text:p>8.33</text:p>
          </table:table-cell>
          <table:table-cell table:style-name="ce269" office:value-type="float" office:value="1" calcext:value-type="float">
            <text:p>1</text:p>
          </table:table-cell>
          <table:table-cell table:style-name="ce189"/>
          <table:table-cell table:style-name="ce189" table:formula="of:=[.D12]" office:value-type="float" office:value="8.33333333333333" calcext:value-type="float">
            <text:p>8.33</text:p>
          </table:table-cell>
          <table:table-cell table:style-name="ce307" table:formula="of:=[.F12]+[.G12]" office:value-type="float" office:value="8.33333333333333" calcext:value-type="float">
            <text:p>8.3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8" office:value-type="string" calcext:value-type="string">
            <text:p>Amortizacion de Intangibles</text:p>
          </table:table-cell>
          <table:table-cell table:style-name="ce267" table:formula="of:=+[$'Inversión inicial'.F35]/120" office:value-type="float" office:value="5.3587962962963" calcext:value-type="float">
            <text:p>5.36</text:p>
          </table:table-cell>
          <table:table-cell table:style-name="ce270" office:value-type="float" office:value="1" calcext:value-type="float">
            <text:p>1</text:p>
          </table:table-cell>
          <table:table-cell table:style-name="ce267" table:formula="of:=[.D13]" office:value-type="float" office:value="5.3587962962963" calcext:value-type="float">
            <text:p>5.36</text:p>
          </table:table-cell>
          <table:table-cell table:style-name="ce267"/>
          <table:table-cell table:style-name="ce307" table:formula="of:=[.F13]+[.G13]" office:value-type="float" office:value="5.3587962962963" calcext:value-type="float">
            <text:p>5.3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9" office:value-type="string" calcext:value-type="string">
            <text:p>TOTAL GASTOS DE ADMINISTRACION</text:p>
          </table:table-cell>
          <table:table-cell table:style-name="ce268" table:formula="of:=SUM([.D8:.D13])" office:value-type="float" office:value="2813.69212962963" calcext:value-type="float">
            <text:p>2,814</text:p>
          </table:table-cell>
          <table:table-cell table:style-name="ce268" table:formula="of:=SUM([.E8:.E13])" office:value-type="float" office:value="5" calcext:value-type="float">
            <text:p>5</text:p>
          </table:table-cell>
          <table:table-cell table:style-name="ce268" table:formula="of:=SUM([.F8:.F13])" office:value-type="float" office:value="2783.13657407407" calcext:value-type="float">
            <text:p>2,783</text:p>
          </table:table-cell>
          <table:table-cell table:style-name="ce268" table:formula="of:=SUM([.G8:.G13])" office:value-type="float" office:value="30.5555555555556" calcext:value-type="float">
            <text:p>31</text:p>
          </table:table-cell>
          <table:table-cell table:style-name="ce268" table:formula="of:=SUM([.H8:.H13])" office:value-type="float" office:value="2813.69212962963" calcext:value-type="float">
            <text:p>2,814</text:p>
          </table:table-cell>
          <table:table-cell table:style-name="ce311" table:formula="of:=+[.H14]-[.H13]" office:value-type="float" office:value="2808.33333333333" calcext:value-type="float">
            <text:p>2,808.33333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50" office:value-type="string" calcext:value-type="string">
            <text:p>GASTOS DE VENTAS</text:p>
          </table:table-cell>
          <table:table-cell table:style-name="ce266" table:number-columns-repeated="4"/>
          <table:table-cell table:style-name="ce308"/>
          <table:table-cell table:number-columns-repeated="16376"/>
        </table:table-row>
        <table:table-row table:style-name="ro1">
          <table:table-cell table:number-columns-repeated="2"/>
          <table:table-cell table:style-name="ce207" office:value-type="string" calcext:value-type="string">
            <text:p>Sueldo de personal</text:p>
          </table:table-cell>
          <table:table-cell table:style-name="ce269" table:formula="of:=[$Sueldos.I12]/12" office:value-type="float" office:value="607.5" calcext:value-type="float">
            <text:p>608</text:p>
          </table:table-cell>
          <table:table-cell table:style-name="ce269" office:value-type="float" office:value="1" calcext:value-type="float">
            <text:p>1</text:p>
          </table:table-cell>
          <table:table-cell table:style-name="ce269" table:formula="of:=[.D16]" office:value-type="float" office:value="607.5" calcext:value-type="float">
            <text:p>608</text:p>
          </table:table-cell>
          <table:table-cell table:style-name="ce269"/>
          <table:table-cell table:style-name="ce309" table:formula="of:=+[.F16]" office:value-type="float" office:value="607.5" calcext:value-type="float">
            <text:p>60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9" office:value-type="string" calcext:value-type="string">
            <text:p>Costos de envío</text:p>
          </table:table-cell>
          <table:table-cell table:style-name="ce269" table:formula="of:=3500/[$Resumen.C20]" office:value-type="float" office:value="972.222222222222" calcext:value-type="float">
            <text:p>972</text:p>
          </table:table-cell>
          <table:table-cell table:style-name="ce269" office:value-type="float" office:value="1" calcext:value-type="float">
            <text:p>1</text:p>
          </table:table-cell>
          <table:table-cell table:style-name="ce269"/>
          <table:table-cell table:style-name="ce269" table:formula="of:=[.D17]" office:value-type="float" office:value="972.222222222222" calcext:value-type="float">
            <text:p>972</text:p>
          </table:table-cell>
          <table:table-cell table:style-name="ce309" table:formula="of:=SUM([.F17:.G17])" office:value-type="float" office:value="972.222222222222" calcext:value-type="float">
            <text:p>97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1" office:value-type="string" calcext:value-type="string">
            <text:p>Promoción</text:p>
          </table:table-cell>
          <table:table-cell table:style-name="ce270" table:formula="of:=+[.G38]/12" office:value-type="float" office:value="111.111111111111" calcext:value-type="float">
            <text:p>111</text:p>
          </table:table-cell>
          <table:table-cell table:style-name="ce270" office:value-type="float" office:value="1" calcext:value-type="float">
            <text:p>1</text:p>
          </table:table-cell>
          <table:table-cell table:style-name="ce270"/>
          <table:table-cell table:style-name="ce270" table:formula="of:=[.D18]" office:value-type="float" office:value="111.111111111111" calcext:value-type="float">
            <text:p>111</text:p>
          </table:table-cell>
          <table:table-cell table:style-name="ce310" table:formula="of:=[.F18]+[.G18]" office:value-type="float" office:value="111.111111111111" calcext:value-type="float">
            <text:p>1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1" office:value-type="string" calcext:value-type="string">
            <text:p>Otros</text:p>
          </table:table-cell>
          <table:table-cell table:style-name="ce270" office:value-type="float" office:value="83.3333333333333" calcext:value-type="float">
            <text:p>83</text:p>
          </table:table-cell>
          <table:table-cell table:style-name="ce270" office:value-type="float" office:value="1" calcext:value-type="float">
            <text:p>1</text:p>
          </table:table-cell>
          <table:table-cell table:style-name="ce270"/>
          <table:table-cell table:style-name="ce270" table:formula="of:=[.D19]" office:value-type="float" office:value="83.3333333333333" calcext:value-type="float">
            <text:p>83</text:p>
          </table:table-cell>
          <table:table-cell table:style-name="ce310" table:formula="of:=[.F19]+[.G19]" office:value-type="float" office:value="83.3333333333333" calcext:value-type="float">
            <text:p>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9" office:value-type="string" calcext:value-type="string">
            <text:p>TOTAL GASTOS DE VENTAS</text:p>
          </table:table-cell>
          <table:table-cell table:style-name="ce268" table:formula="of:=SUM([.D16:.D19])" office:value-type="float" office:value="1774.16666666667" calcext:value-type="float">
            <text:p>1,774</text:p>
          </table:table-cell>
          <table:table-cell table:style-name="ce268" table:formula="of:=SUM([.E16:.E19])" office:value-type="float" office:value="4" calcext:value-type="float">
            <text:p>4</text:p>
          </table:table-cell>
          <table:table-cell table:style-name="ce268" table:formula="of:=SUM([.F16:.F19])" office:value-type="float" office:value="607.5" calcext:value-type="float">
            <text:p>608</text:p>
          </table:table-cell>
          <table:table-cell table:style-name="ce268" table:formula="of:=SUM([.G16:.G19])" office:value-type="float" office:value="1166.66666666667" calcext:value-type="float">
            <text:p>1,167</text:p>
          </table:table-cell>
          <table:table-cell table:style-name="ce268" table:formula="of:=SUM([.H16:.H19])" office:value-type="float" office:value="1774.16666666667" calcext:value-type="float">
            <text:p>1,77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2" office:value-type="string" calcext:value-type="string">
            <text:p>TOTAL GASTOS OPERATIVOS</text:p>
          </table:table-cell>
          <table:table-cell table:style-name="ce271" table:formula="of:=[.D14]+[.D20]" office:value-type="float" office:value="4587.8587962963" calcext:value-type="float">
            <text:p>4,588</text:p>
          </table:table-cell>
          <table:table-cell table:style-name="ce271" table:formula="of:=[.E14]+[.E20]" office:value-type="float" office:value="9" calcext:value-type="float">
            <text:p>9</text:p>
          </table:table-cell>
          <table:table-cell table:style-name="ce271" table:formula="of:=[.F14]+[.F20]" office:value-type="float" office:value="3390.63657407407" calcext:value-type="float">
            <text:p>3,391</text:p>
          </table:table-cell>
          <table:table-cell table:style-name="ce271" table:formula="of:=[.G14]+[.G20]" office:value-type="float" office:value="1197.22222222222" calcext:value-type="float">
            <text:p>1,197</text:p>
          </table:table-cell>
          <table:table-cell table:style-name="ce271" table:formula="of:=[.H14]+[.H20]" office:value-type="float" office:value="4587.8587962963" calcext:value-type="float">
            <text:p>4,5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3" table:number-columns-spanned="2" table:number-rows-spanned="1"/>
          <table:covered-table-cell table:style-name="ce272"/>
          <table:table-cell table:style-name="ce283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11" office:value-type="string" calcext:value-type="string" table:number-columns-spanned="5" table:number-rows-spanned="1">
            <text:p>PRESUPUESTO ANUAL DE PROMOCION</text:p>
          </table:table-cell>
          <table:covered-table-cell table:number-columns-repeated="4" table:style-name="ce221"/>
          <table:table-cell table:number-columns-repeated="16377"/>
        </table:table-row>
        <table:table-row table:style-name="ro1">
          <table:table-cell table:number-columns-repeated="2"/>
          <table:table-cell table:style-name="ce254" table:number-columns-repeated="5"/>
          <table:table-cell table:number-columns-repeated="16377"/>
        </table:table-row>
        <table:table-row table:style-name="ro10">
          <table:table-cell table:number-columns-repeated="2"/>
          <table:table-cell table:style-name="ce255" office:value-type="string" calcext:value-type="string" table:number-columns-spanned="1" table:number-rows-spanned="3">
            <text:p>RUBROS</text:p>
          </table:table-cell>
          <table:table-cell table:style-name="ce273" office:value-type="string" calcext:value-type="string" table:number-columns-spanned="1" table:number-rows-spanned="3">
            <text:p>Unidad Medida</text:p>
          </table:table-cell>
          <table:table-cell table:style-name="ce284" office:value-type="string" calcext:value-type="string" table:number-columns-spanned="1" table:number-rows-spanned="3">
            <text:p>Cantidad</text:p>
          </table:table-cell>
          <table:table-cell table:style-name="ce290" office:value-type="string" calcext:value-type="string" table:number-columns-spanned="1" table:number-rows-spanned="3">
            <text:p>N° veces</text:p>
          </table:table-cell>
          <table:table-cell table:style-name="ce296" office:value-type="string" calcext:value-type="string" table:number-columns-spanned="1" table:number-rows-spanned="3">
            <text:p>COSTO</text:p>
            <text:p> ANUAL</text:p>
            <text:p> 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256"/>
          <table:covered-table-cell table:style-name="ce274"/>
          <table:covered-table-cell table:style-name="ce285"/>
          <table:covered-table-cell table:style-name="ce291"/>
          <table:covered-table-cell table:style-name="ce297"/>
          <table:table-cell table:number-columns-repeated="16377"/>
        </table:table-row>
        <table:table-row table:style-name="ro11">
          <table:table-cell table:number-columns-repeated="2"/>
          <table:covered-table-cell table:style-name="ce257"/>
          <table:covered-table-cell table:style-name="ce275"/>
          <table:covered-table-cell table:style-name="ce286"/>
          <table:covered-table-cell table:style-name="ce292"/>
          <table:covered-table-cell table:style-name="ce298"/>
          <table:table-cell table:number-columns-repeated="16377"/>
        </table:table-row>
        <table:table-row table:style-name="ro12">
          <table:table-cell table:number-columns-repeated="2"/>
          <table:table-cell table:style-name="ce258" office:value-type="string" calcext:value-type="string">
            <text:p>. Spots en radio</text:p>
          </table:table-cell>
          <table:table-cell table:style-name="ce276" table:number-columns-repeated="2"/>
          <table:table-cell table:style-name="ce293"/>
          <table:table-cell table:style-name="ce299"/>
          <table:table-cell table:number-columns-repeated="16377"/>
        </table:table-row>
        <table:table-row table:style-name="ro9">
          <table:table-cell table:number-columns-repeated="2"/>
          <table:table-cell table:style-name="ce259" office:value-type="string" calcext:value-type="string">
            <text:p>. Spots en television</text:p>
          </table:table-cell>
          <table:table-cell table:style-name="ce277" table:number-columns-repeated="2"/>
          <table:table-cell table:style-name="ce294"/>
          <table:table-cell table:style-name="ce300"/>
          <table:table-cell table:number-columns-repeated="16377"/>
        </table:table-row>
        <table:table-row table:style-name="ro1">
          <table:table-cell table:number-columns-repeated="2"/>
          <table:table-cell table:style-name="ce259" office:value-type="string" calcext:value-type="string">
            <text:p>• Gigantografias</text:p>
          </table:table-cell>
          <table:table-cell table:style-name="ce278" table:number-columns-repeated="3"/>
          <table:table-cell table:style-name="ce301"/>
          <table:table-cell table:number-columns-repeated="16377"/>
        </table:table-row>
        <table:table-row table:style-name="ro1">
          <table:table-cell table:number-columns-repeated="2"/>
          <table:table-cell table:style-name="ce259" office:value-type="string" calcext:value-type="string">
            <text:p>• Mandiles</text:p>
          </table:table-cell>
          <table:table-cell table:style-name="ce278" table:number-columns-repeated="3"/>
          <table:table-cell table:style-name="ce301"/>
          <table:table-cell table:number-columns-repeated="16377"/>
        </table:table-row>
        <table:table-row table:style-name="ro1">
          <table:table-cell table:number-columns-repeated="2"/>
          <table:table-cell table:style-name="ce259" office:value-type="string" calcext:value-type="string">
            <text:p>• Polos</text:p>
          </table:table-cell>
          <table:table-cell table:style-name="ce278" table:number-columns-repeated="3"/>
          <table:table-cell table:style-name="ce301"/>
          <table:table-cell table:number-columns-repeated="16377"/>
        </table:table-row>
        <table:table-row table:style-name="ro1">
          <table:table-cell table:number-columns-repeated="2"/>
          <table:table-cell table:style-name="ce259" office:value-type="string" calcext:value-type="string">
            <text:p>• Bolsas</text:p>
          </table:table-cell>
          <table:table-cell table:style-name="ce278" table:number-columns-repeated="3"/>
          <table:table-cell table:style-name="ce301"/>
          <table:table-cell table:number-columns-repeated="16377"/>
        </table:table-row>
        <table:table-row table:style-name="ro1">
          <table:table-cell table:number-columns-repeated="2"/>
          <table:table-cell table:style-name="ce259" office:value-type="string" calcext:value-type="string">
            <text:p>. Redes sociales</text:p>
          </table:table-cell>
          <table:table-cell table:style-name="ce279" office:value-type="float" office:value="27.7777777777778" calcext:value-type="float">
            <text:p>27.78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02" table:formula="of:=[.D34]*[.E34]" office:value-type="currency" office:currency="$" office:value="333.333333333333" calcext:value-type="currency">
            <text:p>$333.3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60" office:value-type="string" calcext:value-type="string">
            <text:p>• Tarjetas personales</text:p>
          </table:table-cell>
          <table:table-cell table:style-name="ce279" office:value-type="float" office:value="27.7777777777778" calcext:value-type="float">
            <text:p>27.78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02" table:formula="of:=[.D35]*[.E35]" office:value-type="currency" office:currency="$" office:value="333.333333333333" calcext:value-type="currency">
            <text:p>$333.3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60" office:value-type="string" calcext:value-type="string">
            <text:p>• mantenimiento de la pagina Web.</text:p>
          </table:table-cell>
          <table:table-cell table:style-name="ce279" office:value-type="float" office:value="55.5555555555556" calcext:value-type="float">
            <text:p>55.56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02" table:formula="of:=[.D36]*[.E36]" office:value-type="currency" office:currency="$" office:value="666.666666666667" calcext:value-type="currency">
            <text:p>$666.67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61" office:value-type="string" calcext:value-type="string">
            <text:p>• tripticos</text:p>
          </table:table-cell>
          <table:table-cell table:style-name="ce280" table:number-columns-repeated="3"/>
          <table:table-cell table:style-name="ce303"/>
          <table:table-cell table:number-columns-repeated="16377"/>
        </table:table-row>
        <table:table-row table:style-name="ro1">
          <table:table-cell table:number-columns-repeated="2"/>
          <table:table-cell table:style-name="ce262" office:value-type="string" calcext:value-type="string">
            <text:p>TOTAL</text:p>
          </table:table-cell>
          <table:table-cell table:style-name="ce281" table:formula="of:=SUM([.D28:.D37])" office:value-type="float" office:value="111.111111111111" calcext:value-type="float">
            <text:p>111.11</text:p>
          </table:table-cell>
          <table:table-cell table:style-name="ce281"/>
          <table:table-cell table:style-name="ce295"/>
          <table:table-cell table:style-name="ce281" table:formula="of:=SUM([.G28:.G37])" office:value-type="float" office:value="1333.33333333333" calcext:value-type="float">
            <text:p>1333.3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82" table:number-columns-repeated="2"/>
          <table:table-cell table:number-columns-repeated="16379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ital_Trabajo" table:style-name="ta11">
        <table:table-column table:style-name="co38" table:default-cell-style-name="Default"/>
        <table:table-column table:style-name="co39" table:default-cell-style-name="ce315"/>
        <table:table-column table:style-name="co15" table:default-cell-style-name="ce324"/>
        <table:table-column table:style-name="co15" table:number-columns-repeated="12" table:default-cell-style-name="ce337"/>
        <table:table-column table:style-name="co15" table:default-cell-style-name="ce355"/>
        <table:table-column table:style-name="co15" table:number-columns-repeated="2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column table:style-name="co38" table:default-cell-style-name="Default"/>
        <table:table-column table:style-name="co15" table:number-columns-repeated="17" table:default-cell-style-name="Default"/>
        <table:table-column table:style-name="co1" table:number-columns-repeated="238" table:default-cell-style-name="Default"/>
        <table:table-row table:style-name="ro1" table:number-rows-repeated="2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3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312" office:value-type="string" calcext:value-type="string" table:number-columns-spanned="1" table:number-rows-spanned="2">
            <text:p>RUBRO</text:p>
          </table:table-cell>
          <table:table-cell table:style-name="ce287" office:value-type="float" office:value="0" calcext:value-type="float" table:number-columns-spanned="1" table:number-rows-spanned="2">
            <text:p>0</text:p>
          </table:table-cell>
          <table:table-cell table:style-name="ce287" office:value-type="string" calcext:value-type="string" table:number-columns-spanned="12" table:number-rows-spanned="1">
            <text:p>MES</text:p>
          </table:table-cell>
          <table:covered-table-cell table:number-columns-repeated="11" table:style-name="ce287"/>
          <table:table-cell table:style-name="ce352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313"/>
          <table:covered-table-cell table:style-name="ce238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covered-table-cell table:style-name="ce353"/>
          <table:table-cell table:number-columns-repeated="16368"/>
        </table:table-row>
        <table:table-row table:style-name="ro1">
          <table:table-cell/>
          <table:table-cell table:style-name="ce314" office:value-type="string" calcext:value-type="string">
            <text:p>Unidades</text:p>
          </table:table-cell>
          <table:table-cell table:style-name="ce323"/>
          <table:table-cell table:style-name="ce336" table:formula="of:=SUM([.D10:.D12])" office:value-type="float" office:value="150" calcext:value-type="float">
            <text:p>150</text:p>
          </table:table-cell>
          <table:table-cell table:style-name="ce336" table:formula="of:=SUM([.E10:.E12])" office:value-type="float" office:value="150" calcext:value-type="float">
            <text:p>150</text:p>
          </table:table-cell>
          <table:table-cell table:style-name="ce336" table:formula="of:=SUM([.F10:.F12])" office:value-type="float" office:value="150" calcext:value-type="float">
            <text:p>150</text:p>
          </table:table-cell>
          <table:table-cell table:style-name="ce336" table:formula="of:=SUM([.G10:.G12])" office:value-type="float" office:value="150" calcext:value-type="float">
            <text:p>150</text:p>
          </table:table-cell>
          <table:table-cell table:style-name="ce336" table:formula="of:=SUM([.H10:.H12])" office:value-type="float" office:value="150" calcext:value-type="float">
            <text:p>150</text:p>
          </table:table-cell>
          <table:table-cell table:style-name="ce336" table:formula="of:=SUM([.I10:.I12])" office:value-type="float" office:value="150" calcext:value-type="float">
            <text:p>150</text:p>
          </table:table-cell>
          <table:table-cell table:style-name="ce336" table:formula="of:=SUM([.J10:.J12])" office:value-type="float" office:value="150" calcext:value-type="float">
            <text:p>150</text:p>
          </table:table-cell>
          <table:table-cell table:style-name="ce336" table:formula="of:=SUM([.K10:.K12])" office:value-type="float" office:value="150" calcext:value-type="float">
            <text:p>150</text:p>
          </table:table-cell>
          <table:table-cell table:style-name="ce336" table:formula="of:=SUM([.L10:.L12])" office:value-type="float" office:value="150" calcext:value-type="float">
            <text:p>150</text:p>
          </table:table-cell>
          <table:table-cell table:style-name="ce336" table:formula="of:=SUM([.M10:.M12])" office:value-type="float" office:value="150" calcext:value-type="float">
            <text:p>150</text:p>
          </table:table-cell>
          <table:table-cell table:style-name="ce336" table:formula="of:=SUM([.N10:.N12])" office:value-type="float" office:value="150" calcext:value-type="float">
            <text:p>150</text:p>
          </table:table-cell>
          <table:table-cell table:style-name="ce336" table:formula="of:=SUM([.O10:.O12])" office:value-type="float" office:value="150" calcext:value-type="float">
            <text:p>150</text:p>
          </table:table-cell>
          <table:table-cell table:style-name="ce354" table:formula="of:=SUM([.D9:.O9])" office:value-type="float" office:value="1800" calcext:value-type="float">
            <text:p>1,800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8]" office:value-type="float" office:value="50" calcext:value-type="float">
            <text:p>50</text:p>
          </table:table-cell>
          <table:table-cell table:formula="of:=+[$'Presupuesto de ventas'.D8]" office:value-type="float" office:value="50" calcext:value-type="float">
            <text:p>50</text:p>
          </table:table-cell>
          <table:table-cell table:formula="of:=+[$'Presupuesto de ventas'.E8]" office:value-type="float" office:value="50" calcext:value-type="float">
            <text:p>50</text:p>
          </table:table-cell>
          <table:table-cell table:formula="of:=+[$'Presupuesto de ventas'.F8]" office:value-type="float" office:value="50" calcext:value-type="float">
            <text:p>50</text:p>
          </table:table-cell>
          <table:table-cell table:formula="of:=+[$'Presupuesto de ventas'.G8]" office:value-type="float" office:value="50" calcext:value-type="float">
            <text:p>50</text:p>
          </table:table-cell>
          <table:table-cell table:formula="of:=+[$'Presupuesto de ventas'.H8]" office:value-type="float" office:value="50" calcext:value-type="float">
            <text:p>50</text:p>
          </table:table-cell>
          <table:table-cell table:formula="of:=+[$'Presupuesto de ventas'.I8]" office:value-type="float" office:value="50" calcext:value-type="float">
            <text:p>50</text:p>
          </table:table-cell>
          <table:table-cell table:formula="of:=+[$'Presupuesto de ventas'.J8]" office:value-type="float" office:value="50" calcext:value-type="float">
            <text:p>50</text:p>
          </table:table-cell>
          <table:table-cell table:formula="of:=+[$'Presupuesto de ventas'.K8]" office:value-type="float" office:value="50" calcext:value-type="float">
            <text:p>50</text:p>
          </table:table-cell>
          <table:table-cell table:formula="of:=+[$'Presupuesto de ventas'.L8]" office:value-type="float" office:value="50" calcext:value-type="float">
            <text:p>50</text:p>
          </table:table-cell>
          <table:table-cell table:formula="of:=+[$'Presupuesto de ventas'.M8]" office:value-type="float" office:value="50" calcext:value-type="float">
            <text:p>50</text:p>
          </table:table-cell>
          <table:table-cell table:formula="of:=+[$'Presupuesto de ventas'.N8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9]" office:value-type="float" office:value="50" calcext:value-type="float">
            <text:p>50</text:p>
          </table:table-cell>
          <table:table-cell table:formula="of:=+[$'Presupuesto de ventas'.D9]" office:value-type="float" office:value="50" calcext:value-type="float">
            <text:p>50</text:p>
          </table:table-cell>
          <table:table-cell table:formula="of:=+[$'Presupuesto de ventas'.E9]" office:value-type="float" office:value="50" calcext:value-type="float">
            <text:p>50</text:p>
          </table:table-cell>
          <table:table-cell table:formula="of:=+[$'Presupuesto de ventas'.F9]" office:value-type="float" office:value="50" calcext:value-type="float">
            <text:p>50</text:p>
          </table:table-cell>
          <table:table-cell table:formula="of:=+[$'Presupuesto de ventas'.G9]" office:value-type="float" office:value="50" calcext:value-type="float">
            <text:p>50</text:p>
          </table:table-cell>
          <table:table-cell table:formula="of:=+[$'Presupuesto de ventas'.H9]" office:value-type="float" office:value="50" calcext:value-type="float">
            <text:p>50</text:p>
          </table:table-cell>
          <table:table-cell table:formula="of:=+[$'Presupuesto de ventas'.I9]" office:value-type="float" office:value="50" calcext:value-type="float">
            <text:p>50</text:p>
          </table:table-cell>
          <table:table-cell table:formula="of:=+[$'Presupuesto de ventas'.J9]" office:value-type="float" office:value="50" calcext:value-type="float">
            <text:p>50</text:p>
          </table:table-cell>
          <table:table-cell table:formula="of:=+[$'Presupuesto de ventas'.K9]" office:value-type="float" office:value="50" calcext:value-type="float">
            <text:p>50</text:p>
          </table:table-cell>
          <table:table-cell table:formula="of:=+[$'Presupuesto de ventas'.L9]" office:value-type="float" office:value="50" calcext:value-type="float">
            <text:p>50</text:p>
          </table:table-cell>
          <table:table-cell table:formula="of:=+[$'Presupuesto de ventas'.M9]" office:value-type="float" office:value="50" calcext:value-type="float">
            <text:p>50</text:p>
          </table:table-cell>
          <table:table-cell table:formula="of:=+[$'Presupuesto de ventas'.N9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0]" office:value-type="float" office:value="50" calcext:value-type="float">
            <text:p>50</text:p>
          </table:table-cell>
          <table:table-cell table:formula="of:=+[$'Presupuesto de ventas'.D10]" office:value-type="float" office:value="50" calcext:value-type="float">
            <text:p>50</text:p>
          </table:table-cell>
          <table:table-cell table:formula="of:=+[$'Presupuesto de ventas'.E10]" office:value-type="float" office:value="50" calcext:value-type="float">
            <text:p>50</text:p>
          </table:table-cell>
          <table:table-cell table:formula="of:=+[$'Presupuesto de ventas'.F10]" office:value-type="float" office:value="50" calcext:value-type="float">
            <text:p>50</text:p>
          </table:table-cell>
          <table:table-cell table:formula="of:=+[$'Presupuesto de ventas'.G10]" office:value-type="float" office:value="50" calcext:value-type="float">
            <text:p>50</text:p>
          </table:table-cell>
          <table:table-cell table:formula="of:=+[$'Presupuesto de ventas'.H10]" office:value-type="float" office:value="50" calcext:value-type="float">
            <text:p>50</text:p>
          </table:table-cell>
          <table:table-cell table:formula="of:=+[$'Presupuesto de ventas'.I10]" office:value-type="float" office:value="50" calcext:value-type="float">
            <text:p>50</text:p>
          </table:table-cell>
          <table:table-cell table:formula="of:=+[$'Presupuesto de ventas'.J10]" office:value-type="float" office:value="50" calcext:value-type="float">
            <text:p>50</text:p>
          </table:table-cell>
          <table:table-cell table:formula="of:=+[$'Presupuesto de ventas'.K10]" office:value-type="float" office:value="50" calcext:value-type="float">
            <text:p>50</text:p>
          </table:table-cell>
          <table:table-cell table:formula="of:=+[$'Presupuesto de ventas'.L10]" office:value-type="float" office:value="50" calcext:value-type="float">
            <text:p>50</text:p>
          </table:table-cell>
          <table:table-cell table:formula="of:=+[$'Presupuesto de ventas'.M10]" office:value-type="float" office:value="50" calcext:value-type="float">
            <text:p>50</text:p>
          </table:table-cell>
          <table:table-cell table:formula="of:=+[$'Presupuesto de ventas'.N10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Unitario</text:p>
          </table:table-cell>
          <table:table-cell table:style-name="ce325"/>
          <table:table-cell table:style-name="ce338"/>
          <table:table-cell table:style-name="ce324" table:number-columns-repeated="4"/>
          <table:table-cell table:style-name="ce341" table:number-columns-repeated="6"/>
          <table:table-cell table:style-name="ce32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<text:s/>de producción total</text:p>
          </table:table-cell>
          <table:table-cell table:style-name="ce326"/>
          <table:table-cell table:style-name="ce336" table:formula="of:=SUM([.D18:.D20])" office:value-type="float" office:value="10898.8094722222" calcext:value-type="float">
            <text:p>10,899</text:p>
          </table:table-cell>
          <table:table-cell table:style-name="ce336" table:formula="of:=SUM([.E18:.E20])" office:value-type="float" office:value="10898.8094722222" calcext:value-type="float">
            <text:p>10,899</text:p>
          </table:table-cell>
          <table:table-cell table:style-name="ce336" table:formula="of:=SUM([.F18:.F20])" office:value-type="float" office:value="10898.8094722222" calcext:value-type="float">
            <text:p>10,899</text:p>
          </table:table-cell>
          <table:table-cell table:style-name="ce336" table:formula="of:=SUM([.G18:.G20])" office:value-type="float" office:value="10898.8094722222" calcext:value-type="float">
            <text:p>10,899</text:p>
          </table:table-cell>
          <table:table-cell table:style-name="ce336" table:formula="of:=SUM([.H18:.H20])" office:value-type="float" office:value="10898.8094722222" calcext:value-type="float">
            <text:p>10,899</text:p>
          </table:table-cell>
          <table:table-cell table:style-name="ce336" table:formula="of:=SUM([.I18:.I20])" office:value-type="float" office:value="10898.8094722222" calcext:value-type="float">
            <text:p>10,899</text:p>
          </table:table-cell>
          <table:table-cell table:style-name="ce336" table:formula="of:=SUM([.J18:.J20])" office:value-type="float" office:value="10898.8094722222" calcext:value-type="float">
            <text:p>10,899</text:p>
          </table:table-cell>
          <table:table-cell table:style-name="ce336" table:formula="of:=SUM([.K18:.K20])" office:value-type="float" office:value="10898.8094722222" calcext:value-type="float">
            <text:p>10,899</text:p>
          </table:table-cell>
          <table:table-cell table:style-name="ce336" table:formula="of:=SUM([.L18:.L20])" office:value-type="float" office:value="10898.8094722222" calcext:value-type="float">
            <text:p>10,899</text:p>
          </table:table-cell>
          <table:table-cell table:style-name="ce336" table:formula="of:=SUM([.M18:.M20])" office:value-type="float" office:value="10898.8094722222" calcext:value-type="float">
            <text:p>10,899</text:p>
          </table:table-cell>
          <table:table-cell table:style-name="ce336" table:formula="of:=SUM([.N18:.N20])" office:value-type="float" office:value="10898.8094722222" calcext:value-type="float">
            <text:p>10,899</text:p>
          </table:table-cell>
          <table:table-cell table:style-name="ce336" table:formula="of:=SUM([.O18:.O20])" office:value-type="float" office:value="10898.8094722222" calcext:value-type="float">
            <text:p>10,899</text:p>
          </table:table-cell>
          <table:table-cell table:style-name="ce354" table:formula="of:=SUM([.D17:.O17])" office:value-type="float" office:value="130785.713666667" calcext:value-type="float">
            <text:p>130,785.7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25"/>
          <table:table-cell table:formula="of:=[.D14]*[.D10]" office:value-type="float" office:value="4626.97352777778" calcext:value-type="float">
            <text:p>4,627</text:p>
          </table:table-cell>
          <table:table-cell table:formula="of:=[.E14]*[.E10]" office:value-type="float" office:value="4626.97352777778" calcext:value-type="float">
            <text:p>4,627</text:p>
          </table:table-cell>
          <table:table-cell table:formula="of:=[.F14]*[.F10]" office:value-type="float" office:value="4626.97352777778" calcext:value-type="float">
            <text:p>4,627</text:p>
          </table:table-cell>
          <table:table-cell table:formula="of:=[.G14]*[.G10]" office:value-type="float" office:value="4626.97352777778" calcext:value-type="float">
            <text:p>4,627</text:p>
          </table:table-cell>
          <table:table-cell table:formula="of:=[.H14]*[.H10]" office:value-type="float" office:value="4626.97352777778" calcext:value-type="float">
            <text:p>4,627</text:p>
          </table:table-cell>
          <table:table-cell table:formula="of:=[.I14]*[.I10]" office:value-type="float" office:value="4626.97352777778" calcext:value-type="float">
            <text:p>4,627</text:p>
          </table:table-cell>
          <table:table-cell table:formula="of:=[.J14]*[.J10]" office:value-type="float" office:value="4626.97352777778" calcext:value-type="float">
            <text:p>4,627</text:p>
          </table:table-cell>
          <table:table-cell table:formula="of:=[.K14]*[.K10]" office:value-type="float" office:value="4626.97352777778" calcext:value-type="float">
            <text:p>4,627</text:p>
          </table:table-cell>
          <table:table-cell table:formula="of:=[.L14]*[.L10]" office:value-type="float" office:value="4626.97352777778" calcext:value-type="float">
            <text:p>4,627</text:p>
          </table:table-cell>
          <table:table-cell table:formula="of:=[.M14]*[.M10]" office:value-type="float" office:value="4626.97352777778" calcext:value-type="float">
            <text:p>4,627</text:p>
          </table:table-cell>
          <table:table-cell table:formula="of:=[.N14]*[.N10]" office:value-type="float" office:value="4626.97352777778" calcext:value-type="float">
            <text:p>4,627</text:p>
          </table:table-cell>
          <table:table-cell table:formula="of:=[.O14]*[.O10]" office:value-type="float" office:value="4626.97352777778" calcext:value-type="float">
            <text:p>4,62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25"/>
          <table:table-cell table:formula="of:=[.D15]*[.D11]" office:value-type="float" office:value="3357.08463888889" calcext:value-type="float">
            <text:p>3,357</text:p>
          </table:table-cell>
          <table:table-cell table:formula="of:=[.E15]*[.E11]" office:value-type="float" office:value="3357.08463888889" calcext:value-type="float">
            <text:p>3,357</text:p>
          </table:table-cell>
          <table:table-cell table:formula="of:=[.F15]*[.F11]" office:value-type="float" office:value="3357.08463888889" calcext:value-type="float">
            <text:p>3,357</text:p>
          </table:table-cell>
          <table:table-cell table:formula="of:=[.G15]*[.G11]" office:value-type="float" office:value="3357.08463888889" calcext:value-type="float">
            <text:p>3,357</text:p>
          </table:table-cell>
          <table:table-cell table:formula="of:=[.H15]*[.H11]" office:value-type="float" office:value="3357.08463888889" calcext:value-type="float">
            <text:p>3,357</text:p>
          </table:table-cell>
          <table:table-cell table:formula="of:=[.I15]*[.I11]" office:value-type="float" office:value="3357.08463888889" calcext:value-type="float">
            <text:p>3,357</text:p>
          </table:table-cell>
          <table:table-cell table:formula="of:=[.J15]*[.J11]" office:value-type="float" office:value="3357.08463888889" calcext:value-type="float">
            <text:p>3,357</text:p>
          </table:table-cell>
          <table:table-cell table:formula="of:=[.K15]*[.K11]" office:value-type="float" office:value="3357.08463888889" calcext:value-type="float">
            <text:p>3,357</text:p>
          </table:table-cell>
          <table:table-cell table:formula="of:=[.L15]*[.L11]" office:value-type="float" office:value="3357.08463888889" calcext:value-type="float">
            <text:p>3,357</text:p>
          </table:table-cell>
          <table:table-cell table:formula="of:=[.M15]*[.M11]" office:value-type="float" office:value="3357.08463888889" calcext:value-type="float">
            <text:p>3,357</text:p>
          </table:table-cell>
          <table:table-cell table:formula="of:=[.N15]*[.N11]" office:value-type="float" office:value="3357.08463888889" calcext:value-type="float">
            <text:p>3,357</text:p>
          </table:table-cell>
          <table:table-cell table:formula="of:=[.O15]*[.O11]" office:value-type="float" office:value="3357.08463888889" calcext:value-type="float">
            <text:p>3,35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25"/>
          <table:table-cell table:formula="of:=[.D16]*[.D12]" office:value-type="float" office:value="2914.75130555556" calcext:value-type="float">
            <text:p>2,915</text:p>
          </table:table-cell>
          <table:table-cell table:formula="of:=[.E16]*[.E12]" office:value-type="float" office:value="2914.75130555556" calcext:value-type="float">
            <text:p>2,915</text:p>
          </table:table-cell>
          <table:table-cell table:formula="of:=[.F16]*[.F12]" office:value-type="float" office:value="2914.75130555556" calcext:value-type="float">
            <text:p>2,915</text:p>
          </table:table-cell>
          <table:table-cell table:formula="of:=[.G16]*[.G12]" office:value-type="float" office:value="2914.75130555556" calcext:value-type="float">
            <text:p>2,915</text:p>
          </table:table-cell>
          <table:table-cell table:formula="of:=[.H16]*[.H12]" office:value-type="float" office:value="2914.75130555556" calcext:value-type="float">
            <text:p>2,915</text:p>
          </table:table-cell>
          <table:table-cell table:formula="of:=[.I16]*[.I12]" office:value-type="float" office:value="2914.75130555556" calcext:value-type="float">
            <text:p>2,915</text:p>
          </table:table-cell>
          <table:table-cell table:formula="of:=[.J16]*[.J12]" office:value-type="float" office:value="2914.75130555556" calcext:value-type="float">
            <text:p>2,915</text:p>
          </table:table-cell>
          <table:table-cell table:formula="of:=[.K16]*[.K12]" office:value-type="float" office:value="2914.75130555556" calcext:value-type="float">
            <text:p>2,915</text:p>
          </table:table-cell>
          <table:table-cell table:formula="of:=[.L16]*[.L12]" office:value-type="float" office:value="2914.75130555556" calcext:value-type="float">
            <text:p>2,915</text:p>
          </table:table-cell>
          <table:table-cell table:formula="of:=[.M16]*[.M12]" office:value-type="float" office:value="2914.75130555556" calcext:value-type="float">
            <text:p>2,915</text:p>
          </table:table-cell>
          <table:table-cell table:formula="of:=[.N16]*[.N12]" office:value-type="float" office:value="2914.75130555556" calcext:value-type="float">
            <text:p>2,915</text:p>
          </table:table-cell>
          <table:table-cell table:formula="of:=[.O16]*[.O12]" office:value-type="float" office:value="2914.75130555556" calcext:value-type="float">
            <text:p>2,915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Gatos Operativos</text:p>
          </table:table-cell>
          <table:table-cell table:style-name="ce323"/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39" table:formula="of:=[$'Gastos operativos'.$H$21]-[$'Gastos operativos'.$H$13]" office:value-type="float" office:value="4582.5" calcext:value-type="float">
            <text:p>4,582.50</text:p>
          </table:table-cell>
          <table:table-cell table:style-name="ce354" table:formula="of:=SUM([.D21:.O21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24" table:number-columns-repeated="11"/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apital de Trabajo</text:p>
          </table:table-cell>
          <table:table-cell table:style-name="ce327"/>
          <table:table-cell table:style-name="ce340" table:formula="of:=[.D17]+[.D21]" office:value-type="float" office:value="15481.3094722222" calcext:value-type="float">
            <text:p>15,481.31</text:p>
          </table:table-cell>
          <table:table-cell table:style-name="ce339" table:formula="of:=[.E17]+[.E21]" office:value-type="float" office:value="15481.3094722222" calcext:value-type="float">
            <text:p>15,481.31</text:p>
          </table:table-cell>
          <table:table-cell table:style-name="ce339" table:formula="of:=[.F17]+[.F21]" office:value-type="float" office:value="15481.3094722222" calcext:value-type="float">
            <text:p>15,481.31</text:p>
          </table:table-cell>
          <table:table-cell table:style-name="ce339" table:formula="of:=[.G17]+[.G21]" office:value-type="float" office:value="15481.3094722222" calcext:value-type="float">
            <text:p>15,481.31</text:p>
          </table:table-cell>
          <table:table-cell table:style-name="ce339" table:formula="of:=[.H17]+[.H21]" office:value-type="float" office:value="15481.3094722222" calcext:value-type="float">
            <text:p>15,481.31</text:p>
          </table:table-cell>
          <table:table-cell table:style-name="ce339" table:formula="of:=[.I17]+[.I21]" office:value-type="float" office:value="15481.3094722222" calcext:value-type="float">
            <text:p>15,481.31</text:p>
          </table:table-cell>
          <table:table-cell table:style-name="ce339" table:formula="of:=[.J17]+[.J21]" office:value-type="float" office:value="15481.3094722222" calcext:value-type="float">
            <text:p>15,481.31</text:p>
          </table:table-cell>
          <table:table-cell table:style-name="ce339" table:formula="of:=[.K17]+[.K21]" office:value-type="float" office:value="15481.3094722222" calcext:value-type="float">
            <text:p>15,481.31</text:p>
          </table:table-cell>
          <table:table-cell table:style-name="ce339" table:formula="of:=[.L17]+[.L21]" office:value-type="float" office:value="15481.3094722222" calcext:value-type="float">
            <text:p>15,481.31</text:p>
          </table:table-cell>
          <table:table-cell table:style-name="ce339" table:formula="of:=[.M17]+[.M21]" office:value-type="float" office:value="15481.3094722222" calcext:value-type="float">
            <text:p>15,481.31</text:p>
          </table:table-cell>
          <table:table-cell table:style-name="ce339" table:formula="of:=[.N17]+[.N21]" office:value-type="float" office:value="15481.3094722222" calcext:value-type="float">
            <text:p>15,481.31</text:p>
          </table:table-cell>
          <table:table-cell table:style-name="ce339" table:formula="of:=[.O17]+[.O21]" office:value-type="float" office:value="15481.3094722222" calcext:value-type="float">
            <text:p>15,481.3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328" table:formula="of:=[.D23]" office:value-type="float" office:value="15481.3094722222" calcext:value-type="float">
            <text:p>15481.31</text:p>
          </table:table-cell>
          <table:table-cell table:style-name="ce341" table:formula="of:=[.E23]-[.D23]" office:value-type="float" office:value="0" calcext:value-type="float">
            <text:p>0</text:p>
          </table:table-cell>
          <table:table-cell table:style-name="ce341" table:formula="of:=[.F23]-[.E23]" office:value-type="float" office:value="0" calcext:value-type="float">
            <text:p>0</text:p>
          </table:table-cell>
          <table:table-cell table:style-name="ce341" table:formula="of:=[.G23]-[.F23]" office:value-type="float" office:value="0" calcext:value-type="float">
            <text:p>0</text:p>
          </table:table-cell>
          <table:table-cell table:style-name="ce341" table:formula="of:=[.H23]-[.G23]" office:value-type="float" office:value="0" calcext:value-type="float">
            <text:p>0</text:p>
          </table:table-cell>
          <table:table-cell table:style-name="ce341" table:formula="of:=[.I23]-[.H23]" office:value-type="float" office:value="0" calcext:value-type="float">
            <text:p>0</text:p>
          </table:table-cell>
          <table:table-cell table:style-name="ce341" table:formula="of:=[.J23]-[.I23]" office:value-type="float" office:value="0" calcext:value-type="float">
            <text:p>0</text:p>
          </table:table-cell>
          <table:table-cell table:style-name="ce341" table:formula="of:=[.K23]-[.J23]" office:value-type="float" office:value="0" calcext:value-type="float">
            <text:p>0</text:p>
          </table:table-cell>
          <table:table-cell table:style-name="ce341" table:formula="of:=[.L23]-[.K23]" office:value-type="float" office:value="0" calcext:value-type="float">
            <text:p>0</text:p>
          </table:table-cell>
          <table:table-cell table:style-name="ce341" table:formula="of:=[.M23]-[.L23]" office:value-type="float" office:value="0" calcext:value-type="float">
            <text:p>0</text:p>
          </table:table-cell>
          <table:table-cell table:style-name="ce341" table:formula="of:=[.N23]-[.M23]" office:value-type="float" office:value="0" calcext:value-type="float">
            <text:p>0</text:p>
          </table:table-cell>
          <table:table-cell table:style-name="ce341" table:formula="of:=[.O23]-[.N23]" office:value-type="float" office:value="0" calcext:value-type="float">
            <text:p>0</text:p>
          </table:table-cell>
          <table:table-cell table:style-name="ce341"/>
          <table:table-cell table:style-name="ce356" table:formula="of:=SUM([.C24:.O24])" office:value-type="float" office:value="15481.3094722222" calcext:value-type="float">
            <text:p>15,481.31</text:p>
          </table:table-cell>
          <table:table-cell office:value-type="string" calcext:value-type="string">
            <text:p>Para flujo en año 0</text:p>
          </table:table-cell>
          <table:table-cell table:number-columns-repeated="16367"/>
        </table:table-row>
        <table:table-row table:style-name="ro1" table:number-rows-repeated="2">
          <table:table-cell/>
          <table:table-cell table:style-name="ce316"/>
          <table:table-cell table:style-name="Default" table:number-columns-repeated="14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2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312" office:value-type="string" calcext:value-type="string" table:number-columns-spanned="1" table:number-rows-spanned="2">
            <text:p>RUBRO</text:p>
          </table:table-cell>
          <table:table-cell table:style-name="ce287" office:value-type="float" office:value="0" calcext:value-type="float" table:number-columns-spanned="1" table:number-rows-spanned="2">
            <text:p>0</text:p>
          </table:table-cell>
          <table:table-cell table:style-name="ce287" office:value-type="string" calcext:value-type="string" table:number-columns-spanned="12" table:number-rows-spanned="1">
            <text:p>MES</text:p>
          </table:table-cell>
          <table:covered-table-cell table:number-columns-repeated="11" table:style-name="ce287"/>
          <table:table-cell table:style-name="ce352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313"/>
          <table:covered-table-cell table:style-name="ce238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covered-table-cell table:style-name="ce353"/>
          <table:table-cell table:number-columns-repeated="16368"/>
        </table:table-row>
        <table:table-row table:style-name="ro1">
          <table:table-cell/>
          <table:table-cell table:style-name="ce314" office:value-type="string" calcext:value-type="string">
            <text:p>Unidades</text:p>
          </table:table-cell>
          <table:table-cell table:style-name="ce323"/>
          <table:table-cell table:style-name="ce336" table:formula="of:=SUM([.D33:.D35])" office:value-type="float" office:value="155" calcext:value-type="float">
            <text:p>155</text:p>
          </table:table-cell>
          <table:table-cell table:style-name="ce336" table:formula="of:=SUM([.E33:.E35])" office:value-type="float" office:value="155" calcext:value-type="float">
            <text:p>155</text:p>
          </table:table-cell>
          <table:table-cell table:style-name="ce336" table:formula="of:=SUM([.F33:.F35])" office:value-type="float" office:value="155" calcext:value-type="float">
            <text:p>155</text:p>
          </table:table-cell>
          <table:table-cell table:style-name="ce336" table:formula="of:=SUM([.G33:.G35])" office:value-type="float" office:value="155" calcext:value-type="float">
            <text:p>155</text:p>
          </table:table-cell>
          <table:table-cell table:style-name="ce336" table:formula="of:=SUM([.H33:.H35])" office:value-type="float" office:value="155" calcext:value-type="float">
            <text:p>155</text:p>
          </table:table-cell>
          <table:table-cell table:style-name="ce336" table:formula="of:=SUM([.I33:.I35])" office:value-type="float" office:value="155" calcext:value-type="float">
            <text:p>155</text:p>
          </table:table-cell>
          <table:table-cell table:style-name="ce336" table:formula="of:=SUM([.J33:.J35])" office:value-type="float" office:value="155" calcext:value-type="float">
            <text:p>155</text:p>
          </table:table-cell>
          <table:table-cell table:style-name="ce336" table:formula="of:=SUM([.K33:.K35])" office:value-type="float" office:value="155" calcext:value-type="float">
            <text:p>155</text:p>
          </table:table-cell>
          <table:table-cell table:style-name="ce336" table:formula="of:=SUM([.L33:.L35])" office:value-type="float" office:value="155" calcext:value-type="float">
            <text:p>155</text:p>
          </table:table-cell>
          <table:table-cell table:style-name="ce336" table:formula="of:=SUM([.M33:.M35])" office:value-type="float" office:value="155" calcext:value-type="float">
            <text:p>155</text:p>
          </table:table-cell>
          <table:table-cell table:style-name="ce336" table:formula="of:=SUM([.N33:.N35])" office:value-type="float" office:value="155" calcext:value-type="float">
            <text:p>155</text:p>
          </table:table-cell>
          <table:table-cell table:style-name="ce336" table:formula="of:=SUM([.O33:.O35])" office:value-type="float" office:value="155" calcext:value-type="float">
            <text:p>155</text:p>
          </table:table-cell>
          <table:table-cell table:style-name="ce354" table:formula="of:=SUM([.D32:.O32])" office:value-type="float" office:value="1860" calcext:value-type="float">
            <text:p>1,860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12]" office:value-type="float" office:value="52" calcext:value-type="float">
            <text:p>52</text:p>
          </table:table-cell>
          <table:table-cell table:formula="of:=+[$'Presupuesto de ventas'.D12]" office:value-type="float" office:value="52" calcext:value-type="float">
            <text:p>52</text:p>
          </table:table-cell>
          <table:table-cell table:formula="of:=+[$'Presupuesto de ventas'.E12]" office:value-type="float" office:value="52" calcext:value-type="float">
            <text:p>52</text:p>
          </table:table-cell>
          <table:table-cell table:formula="of:=+[$'Presupuesto de ventas'.F12]" office:value-type="float" office:value="52" calcext:value-type="float">
            <text:p>52</text:p>
          </table:table-cell>
          <table:table-cell table:formula="of:=+[$'Presupuesto de ventas'.G12]" office:value-type="float" office:value="52" calcext:value-type="float">
            <text:p>52</text:p>
          </table:table-cell>
          <table:table-cell table:formula="of:=+[$'Presupuesto de ventas'.H12]" office:value-type="float" office:value="52" calcext:value-type="float">
            <text:p>52</text:p>
          </table:table-cell>
          <table:table-cell table:formula="of:=+[$'Presupuesto de ventas'.I12]" office:value-type="float" office:value="52" calcext:value-type="float">
            <text:p>52</text:p>
          </table:table-cell>
          <table:table-cell table:formula="of:=+[$'Presupuesto de ventas'.J12]" office:value-type="float" office:value="52" calcext:value-type="float">
            <text:p>52</text:p>
          </table:table-cell>
          <table:table-cell table:formula="of:=+[$'Presupuesto de ventas'.K12]" office:value-type="float" office:value="52" calcext:value-type="float">
            <text:p>52</text:p>
          </table:table-cell>
          <table:table-cell table:formula="of:=+[$'Presupuesto de ventas'.L12]" office:value-type="float" office:value="52" calcext:value-type="float">
            <text:p>52</text:p>
          </table:table-cell>
          <table:table-cell table:formula="of:=+[$'Presupuesto de ventas'.M12]" office:value-type="float" office:value="52" calcext:value-type="float">
            <text:p>52</text:p>
          </table:table-cell>
          <table:table-cell table:formula="of:=+[$'Presupuesto de ventas'.N12]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13]" office:value-type="float" office:value="52" calcext:value-type="float">
            <text:p>52</text:p>
          </table:table-cell>
          <table:table-cell table:formula="of:=+[$'Presupuesto de ventas'.D13]" office:value-type="float" office:value="52" calcext:value-type="float">
            <text:p>52</text:p>
          </table:table-cell>
          <table:table-cell table:formula="of:=+[$'Presupuesto de ventas'.E13]" office:value-type="float" office:value="52" calcext:value-type="float">
            <text:p>52</text:p>
          </table:table-cell>
          <table:table-cell table:formula="of:=+[$'Presupuesto de ventas'.F13]" office:value-type="float" office:value="52" calcext:value-type="float">
            <text:p>52</text:p>
          </table:table-cell>
          <table:table-cell table:formula="of:=+[$'Presupuesto de ventas'.G13]" office:value-type="float" office:value="52" calcext:value-type="float">
            <text:p>52</text:p>
          </table:table-cell>
          <table:table-cell table:formula="of:=+[$'Presupuesto de ventas'.H13]" office:value-type="float" office:value="52" calcext:value-type="float">
            <text:p>52</text:p>
          </table:table-cell>
          <table:table-cell table:formula="of:=+[$'Presupuesto de ventas'.I13]" office:value-type="float" office:value="52" calcext:value-type="float">
            <text:p>52</text:p>
          </table:table-cell>
          <table:table-cell table:formula="of:=+[$'Presupuesto de ventas'.J13]" office:value-type="float" office:value="52" calcext:value-type="float">
            <text:p>52</text:p>
          </table:table-cell>
          <table:table-cell table:formula="of:=+[$'Presupuesto de ventas'.K13]" office:value-type="float" office:value="52" calcext:value-type="float">
            <text:p>52</text:p>
          </table:table-cell>
          <table:table-cell table:formula="of:=+[$'Presupuesto de ventas'.L13]" office:value-type="float" office:value="52" calcext:value-type="float">
            <text:p>52</text:p>
          </table:table-cell>
          <table:table-cell table:formula="of:=+[$'Presupuesto de ventas'.M13]" office:value-type="float" office:value="52" calcext:value-type="float">
            <text:p>52</text:p>
          </table:table-cell>
          <table:table-cell table:formula="of:=+[$'Presupuesto de ventas'.N13]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4]" office:value-type="float" office:value="51" calcext:value-type="float">
            <text:p>51</text:p>
          </table:table-cell>
          <table:table-cell table:formula="of:=+[$'Presupuesto de ventas'.D14]" office:value-type="float" office:value="51" calcext:value-type="float">
            <text:p>51</text:p>
          </table:table-cell>
          <table:table-cell table:formula="of:=+[$'Presupuesto de ventas'.E14]" office:value-type="float" office:value="51" calcext:value-type="float">
            <text:p>51</text:p>
          </table:table-cell>
          <table:table-cell table:formula="of:=+[$'Presupuesto de ventas'.F14]" office:value-type="float" office:value="51" calcext:value-type="float">
            <text:p>51</text:p>
          </table:table-cell>
          <table:table-cell table:formula="of:=+[$'Presupuesto de ventas'.G14]" office:value-type="float" office:value="51" calcext:value-type="float">
            <text:p>51</text:p>
          </table:table-cell>
          <table:table-cell table:formula="of:=+[$'Presupuesto de ventas'.H14]" office:value-type="float" office:value="51" calcext:value-type="float">
            <text:p>51</text:p>
          </table:table-cell>
          <table:table-cell table:formula="of:=+[$'Presupuesto de ventas'.I14]" office:value-type="float" office:value="51" calcext:value-type="float">
            <text:p>51</text:p>
          </table:table-cell>
          <table:table-cell table:formula="of:=+[$'Presupuesto de ventas'.J14]" office:value-type="float" office:value="51" calcext:value-type="float">
            <text:p>51</text:p>
          </table:table-cell>
          <table:table-cell table:formula="of:=+[$'Presupuesto de ventas'.K14]" office:value-type="float" office:value="51" calcext:value-type="float">
            <text:p>51</text:p>
          </table:table-cell>
          <table:table-cell table:formula="of:=+[$'Presupuesto de ventas'.L14]" office:value-type="float" office:value="51" calcext:value-type="float">
            <text:p>51</text:p>
          </table:table-cell>
          <table:table-cell table:formula="of:=+[$'Presupuesto de ventas'.M14]" office:value-type="float" office:value="51" calcext:value-type="float">
            <text:p>51</text:p>
          </table:table-cell>
          <table:table-cell table:formula="of:=+[$'Presupuesto de ventas'.N14]" office:value-type="float" office:value="51" calcext:value-type="float">
            <text:p>51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Unitario</text:p>
          </table:table-cell>
          <table:table-cell table:style-name="ce325"/>
          <table:table-cell table:style-name="ce338"/>
          <table:table-cell table:style-name="ce324" table:number-columns-repeated="4"/>
          <table:table-cell table:style-name="ce341" table:number-columns-repeated="6"/>
          <table:table-cell table:style-name="ce32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producción total</text:p>
          </table:table-cell>
          <table:table-cell table:style-name="ce326"/>
          <table:table-cell table:style-name="ce336" table:formula="of:=SUM([.D41:.D43])" office:value-type="float" office:value="11276.466825" calcext:value-type="float">
            <text:p>11,276</text:p>
          </table:table-cell>
          <table:table-cell table:style-name="ce336" table:formula="of:=SUM([.E41:.E43])" office:value-type="float" office:value="11276.466825" calcext:value-type="float">
            <text:p>11,276</text:p>
          </table:table-cell>
          <table:table-cell table:style-name="ce336" table:formula="of:=SUM([.F41:.F43])" office:value-type="float" office:value="11276.466825" calcext:value-type="float">
            <text:p>11,276</text:p>
          </table:table-cell>
          <table:table-cell table:style-name="ce336" table:formula="of:=SUM([.G41:.G43])" office:value-type="float" office:value="11276.466825" calcext:value-type="float">
            <text:p>11,276</text:p>
          </table:table-cell>
          <table:table-cell table:style-name="ce336" table:formula="of:=SUM([.H41:.H43])" office:value-type="float" office:value="11276.466825" calcext:value-type="float">
            <text:p>11,276</text:p>
          </table:table-cell>
          <table:table-cell table:style-name="ce336" table:formula="of:=SUM([.I41:.I43])" office:value-type="float" office:value="11276.466825" calcext:value-type="float">
            <text:p>11,276</text:p>
          </table:table-cell>
          <table:table-cell table:style-name="ce336" table:formula="of:=SUM([.J41:.J43])" office:value-type="float" office:value="11276.466825" calcext:value-type="float">
            <text:p>11,276</text:p>
          </table:table-cell>
          <table:table-cell table:style-name="ce336" table:formula="of:=SUM([.K41:.K43])" office:value-type="float" office:value="11276.466825" calcext:value-type="float">
            <text:p>11,276</text:p>
          </table:table-cell>
          <table:table-cell table:style-name="ce336" table:formula="of:=SUM([.L41:.L43])" office:value-type="float" office:value="11276.466825" calcext:value-type="float">
            <text:p>11,276</text:p>
          </table:table-cell>
          <table:table-cell table:style-name="ce336" table:formula="of:=SUM([.M41:.M43])" office:value-type="float" office:value="11276.466825" calcext:value-type="float">
            <text:p>11,276</text:p>
          </table:table-cell>
          <table:table-cell table:style-name="ce336" table:formula="of:=SUM([.N41:.N43])" office:value-type="float" office:value="11276.466825" calcext:value-type="float">
            <text:p>11,276</text:p>
          </table:table-cell>
          <table:table-cell table:style-name="ce336" table:formula="of:=SUM([.O41:.O43])" office:value-type="float" office:value="11276.466825" calcext:value-type="float">
            <text:p>11,276</text:p>
          </table:table-cell>
          <table:table-cell table:style-name="ce354" table:formula="of:=SUM([.D40:.O40])" office:value-type="float" office:value="135317.6019" calcext:value-type="float">
            <text:p>135,317.6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25"/>
          <table:table-cell table:formula="of:=[.D37]*[.D33]" office:value-type="float" office:value="4812.05246888889" calcext:value-type="float">
            <text:p>4,812</text:p>
          </table:table-cell>
          <table:table-cell table:formula="of:=[.E37]*[.E33]" office:value-type="float" office:value="4812.05246888889" calcext:value-type="float">
            <text:p>4,812</text:p>
          </table:table-cell>
          <table:table-cell table:formula="of:=[.F37]*[.F33]" office:value-type="float" office:value="4812.05246888889" calcext:value-type="float">
            <text:p>4,812</text:p>
          </table:table-cell>
          <table:table-cell table:formula="of:=[.G37]*[.G33]" office:value-type="float" office:value="4812.05246888889" calcext:value-type="float">
            <text:p>4,812</text:p>
          </table:table-cell>
          <table:table-cell table:formula="of:=[.H37]*[.H33]" office:value-type="float" office:value="4812.05246888889" calcext:value-type="float">
            <text:p>4,812</text:p>
          </table:table-cell>
          <table:table-cell table:formula="of:=[.I37]*[.I33]" office:value-type="float" office:value="4812.05246888889" calcext:value-type="float">
            <text:p>4,812</text:p>
          </table:table-cell>
          <table:table-cell table:formula="of:=[.J37]*[.J33]" office:value-type="float" office:value="4812.05246888889" calcext:value-type="float">
            <text:p>4,812</text:p>
          </table:table-cell>
          <table:table-cell table:formula="of:=[.K37]*[.K33]" office:value-type="float" office:value="4812.05246888889" calcext:value-type="float">
            <text:p>4,812</text:p>
          </table:table-cell>
          <table:table-cell table:formula="of:=[.L37]*[.L33]" office:value-type="float" office:value="4812.05246888889" calcext:value-type="float">
            <text:p>4,812</text:p>
          </table:table-cell>
          <table:table-cell table:formula="of:=[.M37]*[.M33]" office:value-type="float" office:value="4812.05246888889" calcext:value-type="float">
            <text:p>4,812</text:p>
          </table:table-cell>
          <table:table-cell table:formula="of:=[.N37]*[.N33]" office:value-type="float" office:value="4812.05246888889" calcext:value-type="float">
            <text:p>4,812</text:p>
          </table:table-cell>
          <table:table-cell table:formula="of:=[.O37]*[.O33]" office:value-type="float" office:value="4812.05246888889" calcext:value-type="float">
            <text:p>4,81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25"/>
          <table:table-cell table:formula="of:=[.D38]*[.D34]" office:value-type="float" office:value="3491.36802444444" calcext:value-type="float">
            <text:p>3,491</text:p>
          </table:table-cell>
          <table:table-cell table:formula="of:=[.E38]*[.E34]" office:value-type="float" office:value="3491.36802444444" calcext:value-type="float">
            <text:p>3,491</text:p>
          </table:table-cell>
          <table:table-cell table:formula="of:=[.F38]*[.F34]" office:value-type="float" office:value="3491.36802444444" calcext:value-type="float">
            <text:p>3,491</text:p>
          </table:table-cell>
          <table:table-cell table:formula="of:=[.G38]*[.G34]" office:value-type="float" office:value="3491.36802444444" calcext:value-type="float">
            <text:p>3,491</text:p>
          </table:table-cell>
          <table:table-cell table:formula="of:=[.H38]*[.H34]" office:value-type="float" office:value="3491.36802444444" calcext:value-type="float">
            <text:p>3,491</text:p>
          </table:table-cell>
          <table:table-cell table:formula="of:=[.I38]*[.I34]" office:value-type="float" office:value="3491.36802444444" calcext:value-type="float">
            <text:p>3,491</text:p>
          </table:table-cell>
          <table:table-cell table:formula="of:=[.J38]*[.J34]" office:value-type="float" office:value="3491.36802444444" calcext:value-type="float">
            <text:p>3,491</text:p>
          </table:table-cell>
          <table:table-cell table:formula="of:=[.K38]*[.K34]" office:value-type="float" office:value="3491.36802444444" calcext:value-type="float">
            <text:p>3,491</text:p>
          </table:table-cell>
          <table:table-cell table:formula="of:=[.L38]*[.L34]" office:value-type="float" office:value="3491.36802444444" calcext:value-type="float">
            <text:p>3,491</text:p>
          </table:table-cell>
          <table:table-cell table:formula="of:=[.M38]*[.M34]" office:value-type="float" office:value="3491.36802444444" calcext:value-type="float">
            <text:p>3,491</text:p>
          </table:table-cell>
          <table:table-cell table:formula="of:=[.N38]*[.N34]" office:value-type="float" office:value="3491.36802444444" calcext:value-type="float">
            <text:p>3,491</text:p>
          </table:table-cell>
          <table:table-cell table:formula="of:=[.O38]*[.O34]" office:value-type="float" office:value="3491.36802444444" calcext:value-type="float">
            <text:p>3,49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25"/>
          <table:table-cell table:formula="of:=[.D39]*[.D35]" office:value-type="float" office:value="2973.04633166667" calcext:value-type="float">
            <text:p>2,973</text:p>
          </table:table-cell>
          <table:table-cell table:formula="of:=[.E39]*[.E35]" office:value-type="float" office:value="2973.04633166667" calcext:value-type="float">
            <text:p>2,973</text:p>
          </table:table-cell>
          <table:table-cell table:formula="of:=[.F39]*[.F35]" office:value-type="float" office:value="2973.04633166667" calcext:value-type="float">
            <text:p>2,973</text:p>
          </table:table-cell>
          <table:table-cell table:formula="of:=[.G39]*[.G35]" office:value-type="float" office:value="2973.04633166667" calcext:value-type="float">
            <text:p>2,973</text:p>
          </table:table-cell>
          <table:table-cell table:formula="of:=[.H39]*[.H35]" office:value-type="float" office:value="2973.04633166667" calcext:value-type="float">
            <text:p>2,973</text:p>
          </table:table-cell>
          <table:table-cell table:formula="of:=[.I39]*[.I35]" office:value-type="float" office:value="2973.04633166667" calcext:value-type="float">
            <text:p>2,973</text:p>
          </table:table-cell>
          <table:table-cell table:formula="of:=[.J39]*[.J35]" office:value-type="float" office:value="2973.04633166667" calcext:value-type="float">
            <text:p>2,973</text:p>
          </table:table-cell>
          <table:table-cell table:formula="of:=[.K39]*[.K35]" office:value-type="float" office:value="2973.04633166667" calcext:value-type="float">
            <text:p>2,973</text:p>
          </table:table-cell>
          <table:table-cell table:formula="of:=[.L39]*[.L35]" office:value-type="float" office:value="2973.04633166667" calcext:value-type="float">
            <text:p>2,973</text:p>
          </table:table-cell>
          <table:table-cell table:formula="of:=[.M39]*[.M35]" office:value-type="float" office:value="2973.04633166667" calcext:value-type="float">
            <text:p>2,973</text:p>
          </table:table-cell>
          <table:table-cell table:formula="of:=[.N39]*[.N35]" office:value-type="float" office:value="2973.04633166667" calcext:value-type="float">
            <text:p>2,973</text:p>
          </table:table-cell>
          <table:table-cell table:formula="of:=[.O39]*[.O35]" office:value-type="float" office:value="2973.04633166667" calcext:value-type="float">
            <text:p>2,973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Gastos Operativos</text:p>
          </table:table-cell>
          <table:table-cell table:style-name="ce323"/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54" table:formula="of:=SUM([.D44:.O44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24" table:number-columns-repeated="11"/>
          <table:table-cell table:number-columns-repeated="16369"/>
        </table:table-row>
        <table:table-row table:style-name="ro1">
          <table:table-cell/>
          <table:table-cell table:style-name="ce317" office:value-type="string" calcext:value-type="string">
            <text:p>Capital de Trabajo</text:p>
          </table:table-cell>
          <table:table-cell table:style-name="ce329"/>
          <table:table-cell table:style-name="ce342" table:formula="of:=+[.D44]+[.D40]" office:value-type="float" office:value="15858.966825" calcext:value-type="float">
            <text:p>15,858.97</text:p>
          </table:table-cell>
          <table:table-cell table:style-name="ce344" table:formula="of:=[.E40]+[.E44]" office:value-type="float" office:value="15858.966825" calcext:value-type="float">
            <text:p>15,858.97</text:p>
          </table:table-cell>
          <table:table-cell table:style-name="ce344" table:formula="of:=[.F40]+[.F44]" office:value-type="float" office:value="15858.966825" calcext:value-type="float">
            <text:p>15,858.97</text:p>
          </table:table-cell>
          <table:table-cell table:style-name="ce344" table:formula="of:=[.G40]+[.G44]" office:value-type="float" office:value="15858.966825" calcext:value-type="float">
            <text:p>15,858.97</text:p>
          </table:table-cell>
          <table:table-cell table:style-name="ce344" table:formula="of:=[.H40]+[.H44]" office:value-type="float" office:value="15858.966825" calcext:value-type="float">
            <text:p>15,858.97</text:p>
          </table:table-cell>
          <table:table-cell table:style-name="ce344" table:formula="of:=[.I40]+[.I44]" office:value-type="float" office:value="15858.966825" calcext:value-type="float">
            <text:p>15,858.97</text:p>
          </table:table-cell>
          <table:table-cell table:style-name="ce344" table:formula="of:=[.J40]+[.J44]" office:value-type="float" office:value="15858.966825" calcext:value-type="float">
            <text:p>15,858.97</text:p>
          </table:table-cell>
          <table:table-cell table:style-name="ce344" table:formula="of:=[.K40]+[.K44]" office:value-type="float" office:value="15858.966825" calcext:value-type="float">
            <text:p>15,858.97</text:p>
          </table:table-cell>
          <table:table-cell table:style-name="ce344" table:formula="of:=[.L40]+[.L44]" office:value-type="float" office:value="15858.966825" calcext:value-type="float">
            <text:p>15,858.97</text:p>
          </table:table-cell>
          <table:table-cell table:style-name="ce344" table:formula="of:=[.M40]+[.M44]" office:value-type="float" office:value="15858.966825" calcext:value-type="float">
            <text:p>15,858.97</text:p>
          </table:table-cell>
          <table:table-cell table:style-name="ce344" table:formula="of:=[.N40]+[.N44]" office:value-type="float" office:value="15858.966825" calcext:value-type="float">
            <text:p>15,858.97</text:p>
          </table:table-cell>
          <table:table-cell table:style-name="ce344" table:formula="of:=[.O40]+[.O44]" office:value-type="float" office:value="15858.966825" calcext:value-type="float">
            <text:p>15,858.97</text:p>
          </table:table-cell>
          <table:table-cell table:style-name="ce357"/>
          <table:table-cell table:number-columns-repeated="16368"/>
        </table:table-row>
        <table:table-row table:style-name="ro1">
          <table:table-cell/>
          <table:table-cell table:style-name="ce318" office:value-type="string" calcext:value-type="string">
            <text:p>Variacion KW</text:p>
          </table:table-cell>
          <table:table-cell table:style-name="ce330" table:formula="of:=[.D46]-[.O23]" office:value-type="float" office:value="377.65735277778" calcext:value-type="float">
            <text:p>377.66</text:p>
          </table:table-cell>
          <table:table-cell table:style-name="ce343" table:formula="of:=[.E46]-[.D46]" office:value-type="float" office:value="0" calcext:value-type="float">
            <text:p>0</text:p>
          </table:table-cell>
          <table:table-cell table:style-name="ce343" table:formula="of:=[.F46]-[.E46]" office:value-type="float" office:value="0" calcext:value-type="float">
            <text:p>0</text:p>
          </table:table-cell>
          <table:table-cell table:style-name="ce343" table:formula="of:=[.G46]-[.F46]" office:value-type="float" office:value="0" calcext:value-type="float">
            <text:p>0</text:p>
          </table:table-cell>
          <table:table-cell table:style-name="ce343" table:formula="of:=[.H46]-[.G46]" office:value-type="float" office:value="0" calcext:value-type="float">
            <text:p>0</text:p>
          </table:table-cell>
          <table:table-cell table:style-name="ce343" table:formula="of:=[.I46]-[.H46]" office:value-type="float" office:value="0" calcext:value-type="float">
            <text:p>0</text:p>
          </table:table-cell>
          <table:table-cell table:style-name="ce343" table:formula="of:=[.J46]-[.I46]" office:value-type="float" office:value="0" calcext:value-type="float">
            <text:p>0</text:p>
          </table:table-cell>
          <table:table-cell table:style-name="ce343" table:formula="of:=[.K46]-[.J46]" office:value-type="float" office:value="0" calcext:value-type="float">
            <text:p>0</text:p>
          </table:table-cell>
          <table:table-cell table:style-name="ce343" table:formula="of:=[.L46]-[.K46]" office:value-type="float" office:value="0" calcext:value-type="float">
            <text:p>0</text:p>
          </table:table-cell>
          <table:table-cell table:style-name="ce343" table:formula="of:=[.M46]-[.L46]" office:value-type="float" office:value="0" calcext:value-type="float">
            <text:p>0</text:p>
          </table:table-cell>
          <table:table-cell table:style-name="ce343" table:formula="of:=[.N46]-[.M46]" office:value-type="float" office:value="0" calcext:value-type="float">
            <text:p>0</text:p>
          </table:table-cell>
          <table:table-cell table:style-name="ce343" table:formula="of:=[.O46]-[.N46]" office:value-type="float" office:value="0" calcext:value-type="float">
            <text:p>0</text:p>
          </table:table-cell>
          <table:table-cell table:style-name="ce343"/>
          <table:table-cell table:style-name="ce358" table:formula="of:=SUM([.C47:.O47])" office:value-type="float" office:value="377.65735277778" calcext:value-type="float">
            <text:p>377.66</text:p>
          </table:table-cell>
          <table:table-cell table:style-name="ce359" office:value-type="string" calcext:value-type="string">
            <text:p>Para flujo de caja año 1</text:p>
          </table:table-cell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331"/>
          <table:table-cell table:style-name="Default" table:number-columns-repeated="13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3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312" office:value-type="string" calcext:value-type="string" table:number-columns-spanned="1" table:number-rows-spanned="2">
            <text:p>RUBRO</text:p>
          </table:table-cell>
          <table:table-cell table:style-name="ce287" office:value-type="float" office:value="0" calcext:value-type="float" table:number-columns-spanned="1" table:number-rows-spanned="2">
            <text:p>0</text:p>
          </table:table-cell>
          <table:table-cell table:style-name="ce287" office:value-type="string" calcext:value-type="string" table:number-columns-spanned="12" table:number-rows-spanned="1">
            <text:p>MES</text:p>
          </table:table-cell>
          <table:covered-table-cell table:number-columns-repeated="11" table:style-name="ce287"/>
          <table:table-cell table:style-name="ce352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313"/>
          <table:covered-table-cell table:style-name="ce238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covered-table-cell table:style-name="ce353"/>
          <table:table-cell table:number-columns-repeated="16368"/>
        </table:table-row>
        <table:table-row table:style-name="ro1">
          <table:table-cell/>
          <table:table-cell table:style-name="ce314" office:value-type="string" calcext:value-type="string">
            <text:p>Unidades</text:p>
          </table:table-cell>
          <table:table-cell table:style-name="ce323"/>
          <table:table-cell table:style-name="ce336" table:formula="of:=SUM([.D55:.D57])" office:value-type="float" office:value="163" calcext:value-type="float">
            <text:p>163</text:p>
          </table:table-cell>
          <table:table-cell table:style-name="ce336" table:formula="of:=SUM([.E55:.E57])" office:value-type="float" office:value="163" calcext:value-type="float">
            <text:p>163</text:p>
          </table:table-cell>
          <table:table-cell table:style-name="ce336" table:formula="of:=SUM([.F55:.F57])" office:value-type="float" office:value="163" calcext:value-type="float">
            <text:p>163</text:p>
          </table:table-cell>
          <table:table-cell table:style-name="ce336" table:formula="of:=SUM([.G55:.G57])" office:value-type="float" office:value="163" calcext:value-type="float">
            <text:p>163</text:p>
          </table:table-cell>
          <table:table-cell table:style-name="ce336" table:formula="of:=SUM([.H55:.H57])" office:value-type="float" office:value="163" calcext:value-type="float">
            <text:p>163</text:p>
          </table:table-cell>
          <table:table-cell table:style-name="ce336" table:formula="of:=SUM([.I55:.I57])" office:value-type="float" office:value="163" calcext:value-type="float">
            <text:p>163</text:p>
          </table:table-cell>
          <table:table-cell table:style-name="ce336" table:formula="of:=SUM([.J55:.J57])" office:value-type="float" office:value="163" calcext:value-type="float">
            <text:p>163</text:p>
          </table:table-cell>
          <table:table-cell table:style-name="ce336" table:formula="of:=SUM([.K55:.K57])" office:value-type="float" office:value="163" calcext:value-type="float">
            <text:p>163</text:p>
          </table:table-cell>
          <table:table-cell table:style-name="ce336" table:formula="of:=SUM([.L55:.L57])" office:value-type="float" office:value="163" calcext:value-type="float">
            <text:p>163</text:p>
          </table:table-cell>
          <table:table-cell table:style-name="ce336" table:formula="of:=SUM([.M55:.M57])" office:value-type="float" office:value="163" calcext:value-type="float">
            <text:p>163</text:p>
          </table:table-cell>
          <table:table-cell table:style-name="ce336" table:formula="of:=SUM([.N55:.N57])" office:value-type="float" office:value="163" calcext:value-type="float">
            <text:p>163</text:p>
          </table:table-cell>
          <table:table-cell table:style-name="ce336" table:formula="of:=SUM([.O55:.O57])" office:value-type="float" office:value="163" calcext:value-type="float">
            <text:p>163</text:p>
          </table:table-cell>
          <table:table-cell table:style-name="ce354" table:formula="of:=SUM([.D54:.O54])" office:value-type="float" office:value="1956" calcext:value-type="float">
            <text:p>1,956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16]" office:value-type="float" office:value="54" calcext:value-type="float">
            <text:p>54</text:p>
          </table:table-cell>
          <table:table-cell table:formula="of:=+[$'Presupuesto de ventas'.D16]" office:value-type="float" office:value="54" calcext:value-type="float">
            <text:p>54</text:p>
          </table:table-cell>
          <table:table-cell table:formula="of:=+[$'Presupuesto de ventas'.E16]" office:value-type="float" office:value="54" calcext:value-type="float">
            <text:p>54</text:p>
          </table:table-cell>
          <table:table-cell table:formula="of:=+[$'Presupuesto de ventas'.F16]" office:value-type="float" office:value="54" calcext:value-type="float">
            <text:p>54</text:p>
          </table:table-cell>
          <table:table-cell table:formula="of:=+[$'Presupuesto de ventas'.G16]" office:value-type="float" office:value="54" calcext:value-type="float">
            <text:p>54</text:p>
          </table:table-cell>
          <table:table-cell table:formula="of:=+[$'Presupuesto de ventas'.H16]" office:value-type="float" office:value="54" calcext:value-type="float">
            <text:p>54</text:p>
          </table:table-cell>
          <table:table-cell table:formula="of:=+[$'Presupuesto de ventas'.I16]" office:value-type="float" office:value="54" calcext:value-type="float">
            <text:p>54</text:p>
          </table:table-cell>
          <table:table-cell table:formula="of:=+[$'Presupuesto de ventas'.J16]" office:value-type="float" office:value="54" calcext:value-type="float">
            <text:p>54</text:p>
          </table:table-cell>
          <table:table-cell table:formula="of:=+[$'Presupuesto de ventas'.K16]" office:value-type="float" office:value="54" calcext:value-type="float">
            <text:p>54</text:p>
          </table:table-cell>
          <table:table-cell table:formula="of:=+[$'Presupuesto de ventas'.L16]" office:value-type="float" office:value="54" calcext:value-type="float">
            <text:p>54</text:p>
          </table:table-cell>
          <table:table-cell table:formula="of:=+[$'Presupuesto de ventas'.M16]" office:value-type="float" office:value="54" calcext:value-type="float">
            <text:p>54</text:p>
          </table:table-cell>
          <table:table-cell table:formula="of:=+[$'Presupuesto de ventas'.N16]" office:value-type="float" office:value="54" calcext:value-type="float">
            <text:p>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17]" office:value-type="float" office:value="55" calcext:value-type="float">
            <text:p>55</text:p>
          </table:table-cell>
          <table:table-cell table:formula="of:=+[$'Presupuesto de ventas'.D17]" office:value-type="float" office:value="55" calcext:value-type="float">
            <text:p>55</text:p>
          </table:table-cell>
          <table:table-cell table:formula="of:=+[$'Presupuesto de ventas'.E17]" office:value-type="float" office:value="55" calcext:value-type="float">
            <text:p>55</text:p>
          </table:table-cell>
          <table:table-cell table:formula="of:=+[$'Presupuesto de ventas'.F17]" office:value-type="float" office:value="55" calcext:value-type="float">
            <text:p>55</text:p>
          </table:table-cell>
          <table:table-cell table:formula="of:=+[$'Presupuesto de ventas'.G17]" office:value-type="float" office:value="55" calcext:value-type="float">
            <text:p>55</text:p>
          </table:table-cell>
          <table:table-cell table:formula="of:=+[$'Presupuesto de ventas'.H17]" office:value-type="float" office:value="55" calcext:value-type="float">
            <text:p>55</text:p>
          </table:table-cell>
          <table:table-cell table:formula="of:=+[$'Presupuesto de ventas'.I17]" office:value-type="float" office:value="55" calcext:value-type="float">
            <text:p>55</text:p>
          </table:table-cell>
          <table:table-cell table:formula="of:=+[$'Presupuesto de ventas'.J17]" office:value-type="float" office:value="55" calcext:value-type="float">
            <text:p>55</text:p>
          </table:table-cell>
          <table:table-cell table:formula="of:=+[$'Presupuesto de ventas'.K17]" office:value-type="float" office:value="55" calcext:value-type="float">
            <text:p>55</text:p>
          </table:table-cell>
          <table:table-cell table:formula="of:=+[$'Presupuesto de ventas'.L17]" office:value-type="float" office:value="55" calcext:value-type="float">
            <text:p>55</text:p>
          </table:table-cell>
          <table:table-cell table:formula="of:=+[$'Presupuesto de ventas'.M17]" office:value-type="float" office:value="55" calcext:value-type="float">
            <text:p>55</text:p>
          </table:table-cell>
          <table:table-cell table:formula="of:=+[$'Presupuesto de ventas'.N17]" office:value-type="float" office:value="55" calcext:value-type="float">
            <text:p>5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8]" office:value-type="float" office:value="54" calcext:value-type="float">
            <text:p>54</text:p>
          </table:table-cell>
          <table:table-cell table:formula="of:=+[$'Presupuesto de ventas'.D18]" office:value-type="float" office:value="54" calcext:value-type="float">
            <text:p>54</text:p>
          </table:table-cell>
          <table:table-cell table:formula="of:=+[$'Presupuesto de ventas'.E18]" office:value-type="float" office:value="54" calcext:value-type="float">
            <text:p>54</text:p>
          </table:table-cell>
          <table:table-cell table:formula="of:=+[$'Presupuesto de ventas'.F18]" office:value-type="float" office:value="54" calcext:value-type="float">
            <text:p>54</text:p>
          </table:table-cell>
          <table:table-cell table:formula="of:=+[$'Presupuesto de ventas'.G18]" office:value-type="float" office:value="54" calcext:value-type="float">
            <text:p>54</text:p>
          </table:table-cell>
          <table:table-cell table:formula="of:=+[$'Presupuesto de ventas'.H18]" office:value-type="float" office:value="54" calcext:value-type="float">
            <text:p>54</text:p>
          </table:table-cell>
          <table:table-cell table:formula="of:=+[$'Presupuesto de ventas'.I18]" office:value-type="float" office:value="54" calcext:value-type="float">
            <text:p>54</text:p>
          </table:table-cell>
          <table:table-cell table:formula="of:=+[$'Presupuesto de ventas'.J18]" office:value-type="float" office:value="54" calcext:value-type="float">
            <text:p>54</text:p>
          </table:table-cell>
          <table:table-cell table:formula="of:=+[$'Presupuesto de ventas'.K18]" office:value-type="float" office:value="54" calcext:value-type="float">
            <text:p>54</text:p>
          </table:table-cell>
          <table:table-cell table:formula="of:=+[$'Presupuesto de ventas'.L18]" office:value-type="float" office:value="54" calcext:value-type="float">
            <text:p>54</text:p>
          </table:table-cell>
          <table:table-cell table:formula="of:=+[$'Presupuesto de ventas'.M18]" office:value-type="float" office:value="54" calcext:value-type="float">
            <text:p>54</text:p>
          </table:table-cell>
          <table:table-cell table:formula="of:=+[$'Presupuesto de ventas'.N18]" office:value-type="float" office:value="54" calcext:value-type="float">
            <text:p>54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producción Unitario</text:p>
          </table:table-cell>
          <table:table-cell table:style-name="ce325"/>
          <table:table-cell table:style-name="ce338"/>
          <table:table-cell table:style-name="ce324" table:number-columns-repeated="4"/>
          <table:table-cell table:style-name="ce341" table:number-columns-repeated="6"/>
          <table:table-cell table:style-name="ce32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style-name="ce338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style-name="ce338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style-name="ce338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V producción total</text:p>
          </table:table-cell>
          <table:table-cell table:style-name="ce326"/>
          <table:table-cell table:style-name="ce336" table:formula="of:=SUM([.D63:.D65])" office:value-type="float" office:value="11837.8559227778" calcext:value-type="float">
            <text:p>11,838</text:p>
          </table:table-cell>
          <table:table-cell table:style-name="ce336" table:formula="of:=SUM([.E63:.E65])" office:value-type="float" office:value="11837.8559227778" calcext:value-type="float">
            <text:p>11,838</text:p>
          </table:table-cell>
          <table:table-cell table:style-name="ce336" table:formula="of:=SUM([.F63:.F65])" office:value-type="float" office:value="11837.8559227778" calcext:value-type="float">
            <text:p>11,838</text:p>
          </table:table-cell>
          <table:table-cell table:style-name="ce336" table:formula="of:=SUM([.G63:.G65])" office:value-type="float" office:value="11837.8559227778" calcext:value-type="float">
            <text:p>11,838</text:p>
          </table:table-cell>
          <table:table-cell table:style-name="ce336" table:formula="of:=SUM([.H63:.H65])" office:value-type="float" office:value="11837.8559227778" calcext:value-type="float">
            <text:p>11,838</text:p>
          </table:table-cell>
          <table:table-cell table:style-name="ce336" table:formula="of:=SUM([.I63:.I65])" office:value-type="float" office:value="11837.8559227778" calcext:value-type="float">
            <text:p>11,838</text:p>
          </table:table-cell>
          <table:table-cell table:style-name="ce336" table:formula="of:=SUM([.J63:.J65])" office:value-type="float" office:value="11837.8559227778" calcext:value-type="float">
            <text:p>11,838</text:p>
          </table:table-cell>
          <table:table-cell table:style-name="ce336" table:formula="of:=SUM([.K63:.K65])" office:value-type="float" office:value="11837.8559227778" calcext:value-type="float">
            <text:p>11,838</text:p>
          </table:table-cell>
          <table:table-cell table:style-name="ce336" table:formula="of:=SUM([.L63:.L65])" office:value-type="float" office:value="11837.8559227778" calcext:value-type="float">
            <text:p>11,838</text:p>
          </table:table-cell>
          <table:table-cell table:style-name="ce336" table:formula="of:=SUM([.M63:.M65])" office:value-type="float" office:value="11837.8559227778" calcext:value-type="float">
            <text:p>11,838</text:p>
          </table:table-cell>
          <table:table-cell table:style-name="ce336" table:formula="of:=SUM([.N63:.N65])" office:value-type="float" office:value="11837.8559227778" calcext:value-type="float">
            <text:p>11,838</text:p>
          </table:table-cell>
          <table:table-cell table:style-name="ce336" table:formula="of:=SUM([.O63:.O65])" office:value-type="float" office:value="11837.8559227778" calcext:value-type="float">
            <text:p>11,838</text:p>
          </table:table-cell>
          <table:table-cell table:style-name="ce354" table:formula="of:=SUM([.D62:.O62])" office:value-type="float" office:value="142054.271073333" calcext:value-type="float">
            <text:p>142,054.2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25"/>
          <table:table-cell table:formula="of:=[.D59]*[.D55]" office:value-type="float" office:value="4997.13141" calcext:value-type="float">
            <text:p>4,997</text:p>
          </table:table-cell>
          <table:table-cell table:formula="of:=[.E59]*[.E55]" office:value-type="float" office:value="4997.13141" calcext:value-type="float">
            <text:p>4,997</text:p>
          </table:table-cell>
          <table:table-cell table:formula="of:=[.F59]*[.F55]" office:value-type="float" office:value="4997.13141" calcext:value-type="float">
            <text:p>4,997</text:p>
          </table:table-cell>
          <table:table-cell table:formula="of:=[.G59]*[.G55]" office:value-type="float" office:value="4997.13141" calcext:value-type="float">
            <text:p>4,997</text:p>
          </table:table-cell>
          <table:table-cell table:formula="of:=[.H59]*[.H55]" office:value-type="float" office:value="4997.13141" calcext:value-type="float">
            <text:p>4,997</text:p>
          </table:table-cell>
          <table:table-cell table:formula="of:=[.I59]*[.I55]" office:value-type="float" office:value="4997.13141" calcext:value-type="float">
            <text:p>4,997</text:p>
          </table:table-cell>
          <table:table-cell table:formula="of:=[.J59]*[.J55]" office:value-type="float" office:value="4997.13141" calcext:value-type="float">
            <text:p>4,997</text:p>
          </table:table-cell>
          <table:table-cell table:formula="of:=[.K59]*[.K55]" office:value-type="float" office:value="4997.13141" calcext:value-type="float">
            <text:p>4,997</text:p>
          </table:table-cell>
          <table:table-cell table:formula="of:=[.L59]*[.L55]" office:value-type="float" office:value="4997.13141" calcext:value-type="float">
            <text:p>4,997</text:p>
          </table:table-cell>
          <table:table-cell table:formula="of:=[.M59]*[.M55]" office:value-type="float" office:value="4997.13141" calcext:value-type="float">
            <text:p>4,997</text:p>
          </table:table-cell>
          <table:table-cell table:formula="of:=[.N59]*[.N55]" office:value-type="float" office:value="4997.13141" calcext:value-type="float">
            <text:p>4,997</text:p>
          </table:table-cell>
          <table:table-cell table:formula="of:=[.O59]*[.O55]" office:value-type="float" office:value="4997.13141" calcext:value-type="float">
            <text:p>4,99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25"/>
          <table:table-cell table:formula="of:=[.D60]*[.D56]" office:value-type="float" office:value="3692.79310277778" calcext:value-type="float">
            <text:p>3,693</text:p>
          </table:table-cell>
          <table:table-cell table:formula="of:=[.E60]*[.E56]" office:value-type="float" office:value="3692.79310277778" calcext:value-type="float">
            <text:p>3,693</text:p>
          </table:table-cell>
          <table:table-cell table:formula="of:=[.F60]*[.F56]" office:value-type="float" office:value="3692.79310277778" calcext:value-type="float">
            <text:p>3,693</text:p>
          </table:table-cell>
          <table:table-cell table:formula="of:=[.G60]*[.G56]" office:value-type="float" office:value="3692.79310277778" calcext:value-type="float">
            <text:p>3,693</text:p>
          </table:table-cell>
          <table:table-cell table:formula="of:=[.H60]*[.H56]" office:value-type="float" office:value="3692.79310277778" calcext:value-type="float">
            <text:p>3,693</text:p>
          </table:table-cell>
          <table:table-cell table:formula="of:=[.I60]*[.I56]" office:value-type="float" office:value="3692.79310277778" calcext:value-type="float">
            <text:p>3,693</text:p>
          </table:table-cell>
          <table:table-cell table:formula="of:=[.J60]*[.J56]" office:value-type="float" office:value="3692.79310277778" calcext:value-type="float">
            <text:p>3,693</text:p>
          </table:table-cell>
          <table:table-cell table:formula="of:=[.K60]*[.K56]" office:value-type="float" office:value="3692.79310277778" calcext:value-type="float">
            <text:p>3,693</text:p>
          </table:table-cell>
          <table:table-cell table:formula="of:=[.L60]*[.L56]" office:value-type="float" office:value="3692.79310277778" calcext:value-type="float">
            <text:p>3,693</text:p>
          </table:table-cell>
          <table:table-cell table:formula="of:=[.M60]*[.M56]" office:value-type="float" office:value="3692.79310277778" calcext:value-type="float">
            <text:p>3,693</text:p>
          </table:table-cell>
          <table:table-cell table:formula="of:=[.N60]*[.N56]" office:value-type="float" office:value="3692.79310277778" calcext:value-type="float">
            <text:p>3,693</text:p>
          </table:table-cell>
          <table:table-cell table:formula="of:=[.O60]*[.O56]" office:value-type="float" office:value="3692.79310277778" calcext:value-type="float">
            <text:p>3,69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25"/>
          <table:table-cell table:formula="of:=[.D61]*[.D57]" office:value-type="float" office:value="3147.93141" calcext:value-type="float">
            <text:p>3,148</text:p>
          </table:table-cell>
          <table:table-cell table:formula="of:=[.E61]*[.E57]" office:value-type="float" office:value="3147.93141" calcext:value-type="float">
            <text:p>3,148</text:p>
          </table:table-cell>
          <table:table-cell table:formula="of:=[.F61]*[.F57]" office:value-type="float" office:value="3147.93141" calcext:value-type="float">
            <text:p>3,148</text:p>
          </table:table-cell>
          <table:table-cell table:formula="of:=[.G61]*[.G57]" office:value-type="float" office:value="3147.93141" calcext:value-type="float">
            <text:p>3,148</text:p>
          </table:table-cell>
          <table:table-cell table:formula="of:=[.H61]*[.H57]" office:value-type="float" office:value="3147.93141" calcext:value-type="float">
            <text:p>3,148</text:p>
          </table:table-cell>
          <table:table-cell table:formula="of:=[.I61]*[.I57]" office:value-type="float" office:value="3147.93141" calcext:value-type="float">
            <text:p>3,148</text:p>
          </table:table-cell>
          <table:table-cell table:formula="of:=[.J61]*[.J57]" office:value-type="float" office:value="3147.93141" calcext:value-type="float">
            <text:p>3,148</text:p>
          </table:table-cell>
          <table:table-cell table:formula="of:=[.K61]*[.K57]" office:value-type="float" office:value="3147.93141" calcext:value-type="float">
            <text:p>3,148</text:p>
          </table:table-cell>
          <table:table-cell table:formula="of:=[.L61]*[.L57]" office:value-type="float" office:value="3147.93141" calcext:value-type="float">
            <text:p>3,148</text:p>
          </table:table-cell>
          <table:table-cell table:formula="of:=[.M61]*[.M57]" office:value-type="float" office:value="3147.93141" calcext:value-type="float">
            <text:p>3,148</text:p>
          </table:table-cell>
          <table:table-cell table:formula="of:=[.N61]*[.N57]" office:value-type="float" office:value="3147.93141" calcext:value-type="float">
            <text:p>3,148</text:p>
          </table:table-cell>
          <table:table-cell table:formula="of:=[.O61]*[.O57]" office:value-type="float" office:value="3147.93141" calcext:value-type="float">
            <text:p>3,148</text:p>
          </table:table-cell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Gastos Operativos</text:p>
          </table:table-cell>
          <table:table-cell table:style-name="ce323"/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39" table:formula="of:=+[$'Gastos operativos'.$H$21]-[$'Gastos operativos'.$H$13]" office:value-type="float" office:value="4582.5" calcext:value-type="float">
            <text:p>4,582.50</text:p>
          </table:table-cell>
          <table:table-cell table:style-name="ce354" table:formula="of:=SUM([.D66:.O66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24" table:number-columns-repeated="11"/>
          <table:table-cell table:number-columns-repeated="16369"/>
        </table:table-row>
        <table:table-row table:style-name="ro1">
          <table:table-cell/>
          <table:table-cell table:style-name="ce314" office:value-type="string" calcext:value-type="string">
            <text:p>Capital de Trabajo</text:p>
          </table:table-cell>
          <table:table-cell table:style-name="ce327"/>
          <table:table-cell table:style-name="ce340" table:formula="of:=+[.D66]+[.D62]" office:value-type="float" office:value="16420.3559227778" calcext:value-type="float">
            <text:p>16,420.36</text:p>
          </table:table-cell>
          <table:table-cell table:style-name="ce339" table:formula="of:=[.E62]+[.E66]" office:value-type="float" office:value="16420.3559227778" calcext:value-type="float">
            <text:p>16,420.36</text:p>
          </table:table-cell>
          <table:table-cell table:style-name="ce339" table:formula="of:=[.F62]+[.F66]" office:value-type="float" office:value="16420.3559227778" calcext:value-type="float">
            <text:p>16,420.36</text:p>
          </table:table-cell>
          <table:table-cell table:style-name="ce339" table:formula="of:=[.G62]+[.G66]" office:value-type="float" office:value="16420.3559227778" calcext:value-type="float">
            <text:p>16,420.36</text:p>
          </table:table-cell>
          <table:table-cell table:style-name="ce339" table:formula="of:=[.H62]+[.H66]" office:value-type="float" office:value="16420.3559227778" calcext:value-type="float">
            <text:p>16,420.36</text:p>
          </table:table-cell>
          <table:table-cell table:style-name="ce339" table:formula="of:=[.I62]+[.I66]" office:value-type="float" office:value="16420.3559227778" calcext:value-type="float">
            <text:p>16,420.36</text:p>
          </table:table-cell>
          <table:table-cell table:style-name="ce339" table:formula="of:=[.J62]+[.J66]" office:value-type="float" office:value="16420.3559227778" calcext:value-type="float">
            <text:p>16,420.36</text:p>
          </table:table-cell>
          <table:table-cell table:style-name="ce339" table:formula="of:=[.K62]+[.K66]" office:value-type="float" office:value="16420.3559227778" calcext:value-type="float">
            <text:p>16,420.36</text:p>
          </table:table-cell>
          <table:table-cell table:style-name="ce339" table:formula="of:=[.L62]+[.L66]" office:value-type="float" office:value="16420.3559227778" calcext:value-type="float">
            <text:p>16,420.36</text:p>
          </table:table-cell>
          <table:table-cell table:style-name="ce339" table:formula="of:=[.M62]+[.M66]" office:value-type="float" office:value="16420.3559227778" calcext:value-type="float">
            <text:p>16,420.36</text:p>
          </table:table-cell>
          <table:table-cell table:style-name="ce339" table:formula="of:=[.N62]+[.N66]" office:value-type="float" office:value="16420.3559227778" calcext:value-type="float">
            <text:p>16,420.36</text:p>
          </table:table-cell>
          <table:table-cell table:style-name="ce339" table:formula="of:=[.O62]+[.O66]" office:value-type="float" office:value="16420.3559227778" calcext:value-type="float">
            <text:p>16,420.3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328" table:formula="of:=[.D68]-[.O46]" office:value-type="float" office:value="561.389097777774" calcext:value-type="float">
            <text:p>561.39</text:p>
          </table:table-cell>
          <table:table-cell table:style-name="ce341" table:formula="of:=[.E68]-[.D68]" office:value-type="float" office:value="0" calcext:value-type="float">
            <text:p>0</text:p>
          </table:table-cell>
          <table:table-cell table:style-name="ce341" table:formula="of:=[.F68]-[.E68]" office:value-type="float" office:value="0" calcext:value-type="float">
            <text:p>0</text:p>
          </table:table-cell>
          <table:table-cell table:style-name="ce341" table:formula="of:=[.G68]-[.F68]" office:value-type="float" office:value="0" calcext:value-type="float">
            <text:p>0</text:p>
          </table:table-cell>
          <table:table-cell table:style-name="ce341" table:formula="of:=[.H68]-[.G68]" office:value-type="float" office:value="0" calcext:value-type="float">
            <text:p>0</text:p>
          </table:table-cell>
          <table:table-cell table:style-name="ce341" table:formula="of:=[.I68]-[.H68]" office:value-type="float" office:value="0" calcext:value-type="float">
            <text:p>0</text:p>
          </table:table-cell>
          <table:table-cell table:style-name="ce341" table:formula="of:=[.J68]-[.I68]" office:value-type="float" office:value="0" calcext:value-type="float">
            <text:p>0</text:p>
          </table:table-cell>
          <table:table-cell table:style-name="ce341" table:formula="of:=[.K68]-[.J68]" office:value-type="float" office:value="0" calcext:value-type="float">
            <text:p>0</text:p>
          </table:table-cell>
          <table:table-cell table:style-name="ce341" table:formula="of:=[.L68]-[.K68]" office:value-type="float" office:value="0" calcext:value-type="float">
            <text:p>0</text:p>
          </table:table-cell>
          <table:table-cell table:style-name="ce341" table:formula="of:=[.M68]-[.L68]" office:value-type="float" office:value="0" calcext:value-type="float">
            <text:p>0</text:p>
          </table:table-cell>
          <table:table-cell table:style-name="ce341" table:formula="of:=[.N68]-[.M68]" office:value-type="float" office:value="0" calcext:value-type="float">
            <text:p>0</text:p>
          </table:table-cell>
          <table:table-cell table:style-name="ce341" table:formula="of:=[.O68]-[.N68]" office:value-type="float" office:value="0" calcext:value-type="float">
            <text:p>0</text:p>
          </table:table-cell>
          <table:table-cell table:style-name="ce341"/>
          <table:table-cell table:style-name="ce356" table:formula="of:=SUM([.C69:.O69])" office:value-type="float" office:value="561.389097777774" calcext:value-type="float">
            <text:p>561.39</text:p>
          </table:table-cell>
          <table:table-cell office:value-type="string" calcext:value-type="string">
            <text:p>para flujo año 2</text:p>
          </table:table-cell>
          <table:table-cell table:number-columns-repeated="16367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319" office:value-type="string" calcext:value-type="string" table:number-columns-spanned="5" table:number-rows-spanned="1">
            <text:p>RESUMEN DEL CAPITAL DE TRABAJO </text:p>
          </table:table-cell>
          <table:covered-table-cell table:number-columns-repeated="4" table:style-name="ce332"/>
          <table:table-cell table:style-name="ce332" table:number-columns-repeated="3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320"/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1" calcext:value-type="float">
            <text:p>1</text:p>
          </table:table-cell>
          <table:table-cell table:style-name="ce333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style-name="ce348" table:number-columns-repeated="3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ce321" office:value-type="string" calcext:value-type="string">
            <text:p>VARIACIÓN KW</text:p>
          </table:table-cell>
          <table:table-cell table:style-name="ce334" table:formula="of:=[.C24]" office:value-type="float" office:value="15481.3094722222" calcext:value-type="float">
            <text:p>15,481.31</text:p>
          </table:table-cell>
          <table:table-cell table:style-name="ce334" table:formula="of:=[.C47]" office:value-type="float" office:value="377.65735277778" calcext:value-type="float">
            <text:p>377.66</text:p>
          </table:table-cell>
          <table:table-cell table:style-name="ce334" table:formula="of:=[.C69]" office:value-type="float" office:value="561.389097777774" calcext:value-type="float">
            <text:p>561.39</text:p>
          </table:table-cell>
          <table:table-cell table:style-name="ce346"/>
          <table:table-cell table:style-name="ce349"/>
          <table:table-cell table:style-name="ce350" table:number-columns-repeated="2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ce322" office:value-type="string" calcext:value-type="string">
            <text:p>RECUPERO KW</text:p>
          </table:table-cell>
          <table:table-cell table:style-name="ce335" table:number-columns-repeated="3"/>
          <table:table-cell table:style-name="ce347" table:formula="of:=SUM([.C75:.E75])" office:value-type="float" office:value="16420.3559227778" calcext:value-type="float">
            <text:p>16,420.36</text:p>
          </table:table-cell>
          <table:table-cell table:style-name="ce350" table:number-columns-repeated="2"/>
          <table:table-cell table:style-name="ce351"/>
          <table:table-cell table:style-name="Default" table:number-columns-repeated="7"/>
          <table:table-cell table:number-columns-repeated="16368"/>
        </table:table-row>
      </table:table>
      <table:table table:name="Costo unitario" table:style-name="ta12">
        <table:table-column table:style-name="co2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ce315"/>
        <table:table-column table:style-name="co32" table:default-cell-style-name="ce380"/>
        <table:table-column table:style-name="co43" table:default-cell-style-name="Default"/>
        <table:table-column table:style-name="co34" table:default-cell-style-name="Default"/>
        <table:table-column table:style-name="co29" table:number-columns-repeated="23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4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number-columns-repeated="26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360" office:value-type="string" calcext:value-type="string" table:number-columns-spanned="2" table:number-rows-spanned="1">
            <text:p>COSTO TOTAL UNITARIO- CTU</text:p>
          </table:table-cell>
          <table:covered-table-cell table:style-name="ce363"/>
          <table:table-cell/>
          <table:table-cell table:style-name="ce367" office:value-type="string" calcext:value-type="string" table:number-columns-spanned="2" table:number-rows-spanned="1">
            <text:p>COSTO UNITARIO: LOTE DE 150/MES</text:p>
          </table:table-cell>
          <table:covered-table-cell table:style-name="ce377"/>
          <table:table-cell table:number-columns-repeated="16378"/>
        </table:table-row>
        <table:table-row table:style-name="ro1">
          <table:table-cell table:number-columns-repeated="4"/>
          <table:table-cell table:style-name="ce228"/>
          <table:table-cell table:style-name="ce378" table:formula="of:=[.F20]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/>
          <table:table-cell table:style-name="ce361" office:value-type="string" calcext:value-type="string">
            <text:p>CTU = <text:s/>CFU + CVU</text:p>
          </table:table-cell>
          <table:table-cell table:number-columns-repeated="2"/>
          <table:table-cell table:style-name="ce368" office:value-type="string" calcext:value-type="string">
            <text:p>Costo fijo mes</text:p>
          </table:table-cell>
          <table:table-cell table:style-name="ce379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Gastos administrativos fijos</text:p>
          </table:table-cell>
          <table:table-cell table:formula="of:=+[$'Gastos operativos'.H14]-[$'Gastos operativos'.H13]" office:value-type="float" office:value="2808.33333333333" calcext:value-type="float">
            <text:p>2808.33</text:p>
          </table:table-cell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Donde:</text:p>
          </table:table-cell>
          <table:table-cell table:number-columns-repeated="2"/>
          <table:table-cell office:value-type="string" calcext:value-type="string">
            <text:p>Depreciación activo fijo</text:p>
          </table:table-cell>
          <table:table-cell table:formula="of:=+[$Depreciación.F9]/12" office:value-type="float" office:value="274.118441358025" calcext:value-type="float">
            <text:p>274.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Amortización de intangibles</text:p>
          </table:table-cell>
          <table:table-cell table:style-name="ce381" table:formula="of:=+[$'Gastos operativos'.H13]" office:value-type="float" office:value="5.3587962962963" calcext:value-type="float">
            <text:p>5.36</text:p>
          </table:table-cell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Costo Fijo Unitario (CFU) = <text:s/></text:p>
          </table:table-cell>
          <table:table-cell table:style-name="ce364" office:value-type="string" calcext:value-type="string">
            <text:p>Costo Fijo Total</text:p>
          </table:table-cell>
          <table:table-cell/>
          <table:table-cell office:value-type="string" calcext:value-type="string">
            <text:p>Gastos de ventas fijos</text:p>
          </table:table-cell>
          <table:table-cell table:formula="of:=+[$'Gastos operativos'.H20]" office:value-type="float" office:value="1774.16666666667" calcext:value-type="float">
            <text:p>1774.1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65" office:value-type="string" calcext:value-type="string">
            <text:p>N° Unidades Producidas</text:p>
          </table:table-cell>
          <table:table-cell/>
          <table:table-cell table:style-name="ce369" office:value-type="string" calcext:value-type="string">
            <text:p>CIF fijos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0" office:value-type="string" calcext:value-type="string">
            <text:p>Total Costo Fijo</text:p>
          </table:table-cell>
          <table:table-cell table:style-name="ce383" table:formula="of:=SUM([.F5:.F9])" office:value-type="float" office:value="4861.97723765432" calcext:value-type="float">
            <text:p>4861.9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1" office:value-type="string" calcext:value-type="string">
            <text:p>Costo variable mes</text:p>
          </table:table-cell>
          <table:table-cell table:style-name="ce384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Costo Variable Unitario (CFU) = <text:s/></text:p>
          </table:table-cell>
          <table:table-cell table:style-name="ce364" office:value-type="string" calcext:value-type="string">
            <text:p>Costo Variable Total</text:p>
          </table:table-cell>
          <table:table-cell/>
          <table:table-cell office:value-type="string" calcext:value-type="string">
            <text:p>MP A</text:p>
          </table:table-cell>
          <table:table-cell table:formula="of:=+[$'Costo de producción'.C8]*[$'Presupuesto de ventas'.C8]" office:value-type="float" office:value="3376.97352777778" calcext:value-type="float">
            <text:p>3376.9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65" office:value-type="string" calcext:value-type="string">
            <text:p>N° Unidades Producidas</text:p>
          </table:table-cell>
          <table:table-cell/>
          <table:table-cell office:value-type="string" calcext:value-type="string">
            <text:p>MP B</text:p>
          </table:table-cell>
          <table:table-cell table:formula="of:=+[$'Costo de producción'.C13]*[$'Presupuesto de ventas'.C9]" office:value-type="float" office:value="2245.97352777778" calcext:value-type="float">
            <text:p>2245.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P C</text:p>
          </table:table-cell>
          <table:table-cell table:formula="of:=+[$'Costo de producción'.C18]*[$'Presupuesto de ventas'.C10]" office:value-type="float" office:value="2011.97352777778" calcext:value-type="float">
            <text:p>2011.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A</text:p>
          </table:table-cell>
          <table:table-cell table:formula="of:=+[$Resumen.C16]*[$'Presupuesto de ventas'.C8]" office:value-type="float" office:value="1250" calcext:value-type="float">
            <text:p>1250.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B</text:p>
          </table:table-cell>
          <table:table-cell table:formula="of:=+[$Resumen.C17]*[$'Presupuesto de ventas'.C9]" office:value-type="float" office:value="1111.11111111111" calcext:value-type="float">
            <text:p>1111.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C</text:p>
          </table:table-cell>
          <table:table-cell table:formula="of:=+[$Resumen.C18]*[$'Presupuesto de ventas'.C10]" office:value-type="float" office:value="902.77777777778" calcext:value-type="float">
            <text:p>902.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Gastos Operativos variables</text:p>
          </table:table-cell>
          <table:table-cell table:formula="of:=[$'Gastos operativos'.G14]+[$'Gastos operativos'.G20]" office:value-type="float" office:value="1197.22222222222" calcext:value-type="float">
            <text:p>1197.22</text:p>
          </table:table-cell>
          <table:table-cell table:number-columns-repeated="16378"/>
        </table:table-row>
        <table:table-row table:style-name="ro1">
          <table:table-cell/>
          <table:table-cell table:style-name="ce360" office:value-type="string" calcext:value-type="string" table:number-columns-spanned="2" table:number-rows-spanned="1">
            <text:p>VALOR <text:s/>DE VENTA ( Vv)</text:p>
          </table:table-cell>
          <table:covered-table-cell table:style-name="ce363"/>
          <table:table-cell/>
          <table:table-cell table:style-name="ce372" office:value-type="string" calcext:value-type="string">
            <text:p>Total Costo Variable</text:p>
          </table:table-cell>
          <table:table-cell table:style-name="ce385" table:formula="of:=SUM([.F12:.F18])" office:value-type="float" office:value="12096.0316944444" calcext:value-type="float">
            <text:p>12096.03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3" office:value-type="string" calcext:value-type="string">
            <text:p>Unidades totales</text:p>
          </table:table-cell>
          <table:table-cell table:style-name="ce386" table:formula="of:=[.F23]+[.F30]+[.F37]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/>
          <table:table-cell table:style-name="ce361" office:value-type="string" calcext:value-type="string">
            <text:p>Vv = CTU + G</text:p>
          </table:table-cell>
          <table:table-cell table:number-columns-repeated="2"/>
          <table:table-cell table:style-name="ce228" office:value-type="string" calcext:value-type="string">
            <text:p>Modelo A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ce366"/>
          <table:table-cell/>
          <table:table-cell table:style-name="ce374" office:value-type="string" calcext:value-type="string">
            <text:p>Costos Unitarios</text:p>
          </table:table-cell>
          <table:table-cell table:style-name="ce384" office:value-type="string" calcext:value-type="string">
            <text:p>Dólares</text:p>
          </table:table-cell>
          <table:table-cell table:number-columns-repeated="2"/>
          <table:table-cell table:style-name="ce392" office:value-type="percentage" office:value="0.2" calcext:value-type="percentage">
            <text:p>20 %</text:p>
          </table:table-cell>
          <table:table-cell table:number-columns-repeated="16375"/>
        </table:table-row>
        <table:table-row table:style-name="ro1">
          <table:table-cell/>
          <table:table-cell table:style-name="ce362" office:value-type="string" calcext:value-type="string">
            <text:p>Donde:</text:p>
          </table:table-cell>
          <table:table-cell table:style-name="ce366" table:number-columns-repeated="2"/>
          <table:table-cell table:style-name="ce375" office:value-type="string" calcext:value-type="string">
            <text:p>Nº de Unidades</text:p>
          </table:table-cell>
          <table:table-cell table:style-name="ce387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G = Ganancia</text:p>
          </table:table-cell>
          <table:table-cell table:style-name="ce366"/>
          <table:table-cell/>
          <table:table-cell office:value-type="string" calcext:value-type="string">
            <text:p>Costo fijo unitario,CFU</text:p>
          </table:table-cell>
          <table:table-cell table:formula="of:=+[.F10]/[.F20]" office:value-type="float" office:value="32.4131815843621" calcext:value-type="float">
            <text:p>32.41</text:p>
          </table:table-cell>
          <table:table-cell/>
          <table:table-cell table:style-name="ce391" office:value-type="string" calcext:value-type="string">
            <text:p>PRECIO</text:p>
          </table:table-cell>
          <table:table-cell table:style-name="ce393" table:formula="of:=[$Resumen.C13]" office:value-type="float" office:value="141.536960345679" calcext:value-type="float">
            <text:p>141.5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88" table:formula="of:=+(([.F12]+[.F15])+([.F18]/3))/[.F23]" office:value-type="float" office:value="100.520952037037" calcext:value-type="float">
            <text:p>100.52</text:p>
          </table:table-cell>
          <table:table-cell table:style-name="ce331"/>
          <table:table-cell table:number-columns-repeated="16377"/>
        </table:table-row>
        <table:table-row table:style-name="ro1">
          <table:table-cell/>
          <table:table-cell table:style-name="ce362" office:value-type="string" calcext:value-type="string">
            <text:p>Elementos:</text:p>
          </table:table-cell>
          <table:table-cell table:number-columns-repeated="2"/>
          <table:table-cell table:style-name="ce376" office:value-type="string" calcext:value-type="string">
            <text:p>Costo total unitario, CTU</text:p>
          </table:table-cell>
          <table:table-cell table:style-name="ce389" table:formula="of:=SUM([.F24:.F25])" office:value-type="float" office:value="132.934133621399" calcext:value-type="float">
            <text:p>132.93</text:p>
          </table:table-cell>
          <table:table-cell table:number-columns-repeated="2"/>
          <table:table-cell table:style-name="ce366" table:formula="of:=+[.I24]-[.F26]" office:value-type="float" office:value="8.60282672427985" calcext:value-type="float">
            <text:p>8.60</text:p>
          </table:table-cell>
          <table:table-cell table:number-columns-repeated="16375"/>
        </table:table-row>
        <table:table-row table:style-name="ro1">
          <table:table-cell/>
          <table:table-cell table:style-name="ce228" office:value-type="string" calcext:value-type="string">
            <text:p>1.- Los costos de produccion</text:p>
          </table:table-cell>
          <table:table-cell table:number-columns-repeated="2"/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2.- Precio de venta de la competencia</text:p>
          </table:table-cell>
          <table:table-cell table:number-columns-repeated="2"/>
          <table:table-cell table:style-name="ce228" office:value-type="string" calcext:value-type="string">
            <text:p>Modelo B</text:p>
          </table:table-cell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228" office:value-type="string" calcext:value-type="string">
            <text:p>3.- Expectativas de precio de compra de pontenciales consumidores</text:p>
          </table:table-cell>
          <table:table-cell table:number-columns-repeated="2"/>
          <table:table-cell table:style-name="ce374" office:value-type="string" calcext:value-type="string">
            <text:p>Costos Unitarios</text:p>
          </table:table-cell>
          <table:table-cell table:style-name="ce390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5" office:value-type="string" calcext:value-type="string">
            <text:p>Nº de Unidades</text:p>
          </table:table-cell>
          <table:table-cell table:style-name="ce387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osto fijo unitario,CFU</text:p>
          </table:table-cell>
          <table:table-cell table:formula="of:=+[.F24]" office:value-type="float" office:value="32.4131815843621" calcext:value-type="float">
            <text:p>32.41</text:p>
          </table:table-cell>
          <table:table-cell/>
          <table:table-cell table:style-name="ce391" office:value-type="string" calcext:value-type="string">
            <text:p>PRECIO</text:p>
          </table:table-cell>
          <table:table-cell table:style-name="ce393" table:formula="of:=+[.F33]*(1+[.I22])" office:value-type="float" office:value="129.043627012346" calcext:value-type="float">
            <text:p>129.0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88" table:formula="of:=(([.F13]+[.F16]+([.F18]/3))/[.F30])" office:value-type="float" office:value="75.1231742592592" calcext:value-type="float">
            <text:p>75.1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6" office:value-type="string" calcext:value-type="string">
            <text:p>Costo total unitario, CTU</text:p>
          </table:table-cell>
          <table:table-cell table:style-name="ce389" table:formula="of:=SUM([.F31:.F32])" office:value-type="float" office:value="107.536355843621" calcext:value-type="float">
            <text:p>107.54</text:p>
          </table:table-cell>
          <table:table-cell table:number-columns-repeated="2"/>
          <table:table-cell table:style-name="ce366" table:formula="of:=+[.I31]-[.F33]" office:value-type="float" office:value="21.5072711687243" calcext:value-type="float">
            <text:p>21.51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228" office:value-type="string" calcext:value-type="string">
            <text:p>Modelo C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4"/>
          <table:table-cell table:style-name="ce374" office:value-type="string" calcext:value-type="string">
            <text:p>Costos Unitarios</text:p>
          </table:table-cell>
          <table:table-cell table:style-name="ce390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5" office:value-type="string" calcext:value-type="string">
            <text:p>Nº de Unidades</text:p>
          </table:table-cell>
          <table:table-cell table:style-name="ce387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osto fijo unitario,CFU</text:p>
          </table:table-cell>
          <table:table-cell table:formula="of:=+[.F31]" office:value-type="float" office:value="32.4131815843621" calcext:value-type="float">
            <text:p>32.41</text:p>
          </table:table-cell>
          <table:table-cell/>
          <table:table-cell table:style-name="ce391" office:value-type="string" calcext:value-type="string">
            <text:p>PRECIO</text:p>
          </table:table-cell>
          <table:table-cell table:style-name="ce393" table:formula="of:=+[.F40]*(1+[.I22])" office:value-type="float" office:value="118.427627012346" calcext:value-type="float">
            <text:p>118.4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88" table:formula="of:=+(([.F14]+[.F17])+([.F18]/3))/[.F37]" office:value-type="float" office:value="66.2765075925926" calcext:value-type="float">
            <text:p>66.2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76" office:value-type="string" calcext:value-type="string">
            <text:p>Costo total unitario, CTU</text:p>
          </table:table-cell>
          <table:table-cell table:style-name="ce389" table:formula="of:=SUM([.F38:.F39])" office:value-type="float" office:value="98.6896891769548" calcext:value-type="float">
            <text:p>98.69</text:p>
          </table:table-cell>
          <table:table-cell table:number-columns-repeated="2"/>
          <table:table-cell table:style-name="ce366" table:formula="of:=+[.I38]-[.F40]" office:value-type="float" office:value="19.737937835391" calcext:value-type="float">
            <text:p>19.74</text:p>
          </table:table-cell>
          <table:table-cell table:number-columns-repeated="1637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600*17" office:value-type="float" office:value="10200" calcext:value-type="float">
            <text:p>10200</text:p>
          </table:table-cell>
          <table:table-cell table:number-columns-repeated="16376"/>
        </table:table-row>
      </table:table>
      <table:table table:name="Punto de equilibrio" table:style-name="ta13">
        <table:table-column table:style-name="co12" table:default-cell-style-name="ce204"/>
        <table:table-column table:style-name="co46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6" table:default-cell-style-name="Default"/>
        <table:table-column table:style-name="co29" table:number-columns-repeated="15" table:default-cell-style-name="Default"/>
        <table:table-column table:style-name="co29" table:number-columns-repeated="230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column table:style-name="co12"/>
        <table:table-column table:style-name="co46"/>
        <table:table-column table:style-name="co24"/>
        <table:table-column table:style-name="co12"/>
        <table:table-column table:style-name="co3"/>
        <table:table-column table:style-name="co24"/>
        <table:table-column table:style-name="co47"/>
        <table:table-column table:style-name="co43"/>
        <table:table-column table:style-name="co48"/>
        <table:table-column table:style-name="co49"/>
        <table:table-column table:style-name="co26"/>
        <table:table-column table:style-name="co29" table:number-columns-repeated="245"/>
        <table:table-row table:style-name="ro1">
          <table:table-cell table:number-columns-repeated="26"/>
        </table:table-row>
        <table:table-row table:style-name="ro1">
          <table:table-cell/>
          <table:table-cell table:style-name="ce204"/>
          <table:table-cell table:style-name="ce90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394" office:value-type="string" calcext:value-type="string" table:number-columns-spanned="5" table:number-rows-spanned="1">
            <text:p>PUNTO DE EQULIBRIO PARA VARIOS PRODUCTOS</text:p>
          </table:table-cell>
          <table:covered-table-cell table:number-columns-repeated="3" table:style-name="ce409"/>
          <table:covered-table-cell table:style-name="ce439"/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6">
          <table:table-cell/>
          <table:table-cell table:style-name="ce395" office:value-type="string" calcext:value-type="string">
            <text:p>PRODUCTO</text:p>
          </table:table-cell>
          <table:table-cell table:style-name="ce410" office:value-type="string" calcext:value-type="string">
            <text:p>PRECIO</text:p>
          </table:table-cell>
          <table:table-cell table:style-name="ce410" office:value-type="string" calcext:value-type="string">
            <text:p>CVU</text:p>
          </table:table-cell>
          <table:table-cell table:style-name="ce410" office:value-type="string" calcext:value-type="string">
            <text:p>MgCU</text:p>
          </table:table-cell>
          <table:table-cell table:style-name="ce432" office:value-type="string" calcext:value-type="string">
            <text:p>% del Total</text:p>
            <text:p>Ventas</text:p>
          </table:table-cell>
          <table:table-cell table:number-columns-repeated="20"/>
        </table:table-row>
        <table:table-row table:style-name="ro1">
          <table:table-cell/>
          <table:table-cell table:style-name="ce396" office:value-type="string" calcext:value-type="string">
            <text:p>A</text:p>
          </table:table-cell>
          <table:table-cell table:style-name="ce411" table:formula="of:=+[$Resumen.C13]" office:value-type="float" office:value="141.536960345679" calcext:value-type="float">
            <text:p>141.54</text:p>
          </table:table-cell>
          <table:table-cell table:style-name="ce411" table:formula="of:=+[$Capital_Trabajo.D14]" office:value-type="float" office:value="92.5394705555556" calcext:value-type="float">
            <text:p>92.54</text:p>
          </table:table-cell>
          <table:table-cell table:style-name="ce411" table:formula="of:=[.C7]-[.D7]" office:value-type="float" office:value="48.9974897901235" calcext:value-type="float">
            <text:p>49.00</text:p>
          </table:table-cell>
          <table:table-cell table:style-name="ce440" table:formula="of:=+[$'Presupuesto de ventas'.D26]/[$'Presupuesto de ventas'.$D$25]" office:value-type="percentage" office:value="0.400734538904633" calcext:value-type="percentage">
            <text:p>40.1%</text:p>
          </table:table-cell>
          <table:table-cell table:number-columns-repeated="20"/>
        </table:table-row>
        <table:table-row table:style-name="ro1">
          <table:table-cell/>
          <table:table-cell table:style-name="ce397" office:value-type="string" calcext:value-type="string">
            <text:p>B</text:p>
          </table:table-cell>
          <table:table-cell table:style-name="ce411" table:formula="of:=+[$Resumen.C14]" office:value-type="float" office:value="111.129227012346" calcext:value-type="float">
            <text:p>111.13</text:p>
          </table:table-cell>
          <table:table-cell table:style-name="ce411" table:formula="of:=+[$Capital_Trabajo.D15]" office:value-type="float" office:value="67.1416927777778" calcext:value-type="float">
            <text:p>67.14</text:p>
          </table:table-cell>
          <table:table-cell table:style-name="ce411" table:formula="of:=[.C8]-[.D8]" office:value-type="float" office:value="43.9875342345682" calcext:value-type="float">
            <text:p>43.99</text:p>
          </table:table-cell>
          <table:table-cell table:style-name="ce440" table:formula="of:=+[$'Presupuesto de ventas'.D27]/[$'Presupuesto de ventas'.$D$25]" office:value-type="percentage" office:value="0.314640920907556" calcext:value-type="percentage">
            <text:p>31.5%</text:p>
          </table:table-cell>
          <table:table-cell table:number-columns-repeated="20"/>
        </table:table-row>
        <table:table-row table:style-name="ro1">
          <table:table-cell/>
          <table:table-cell table:style-name="ce397" office:value-type="string" calcext:value-type="string">
            <text:p>C</text:p>
          </table:table-cell>
          <table:table-cell table:style-name="ce411" table:formula="of:=+[$Resumen.C15]" office:value-type="float" office:value="100.527627012346" calcext:value-type="float">
            <text:p>100.53</text:p>
          </table:table-cell>
          <table:table-cell table:style-name="ce411" table:formula="of:=+[$Capital_Trabajo.D16]" office:value-type="float" office:value="58.2950261111112" calcext:value-type="float">
            <text:p>58.30</text:p>
          </table:table-cell>
          <table:table-cell table:style-name="ce411" table:formula="of:=[.C9]-[.D9]" office:value-type="float" office:value="42.2326009012348" calcext:value-type="float">
            <text:p>42.23</text:p>
          </table:table-cell>
          <table:table-cell table:style-name="ce440" table:formula="of:=+[$'Presupuesto de ventas'.D28]/[$'Presupuesto de ventas'.$D$25]" office:value-type="percentage" office:value="0.284624540187811" calcext:value-type="percentage">
            <text:p>28.5%</text:p>
          </table:table-cell>
          <table:table-cell table:number-columns-repeated="20"/>
        </table:table-row>
        <table:table-row table:style-name="ro1">
          <table:table-cell/>
          <table:table-cell table:style-name="ce398" office:value-type="string" calcext:value-type="string">
            <text:p>TOTAL</text:p>
          </table:table-cell>
          <table:table-cell table:style-name="ce412"/>
          <table:table-cell table:style-name="ce422" table:number-columns-repeated="2"/>
          <table:table-cell table:style-name="ce441" table:formula="of:=SUM([.F7:.F9])" office:value-type="percentage" office:value="1" calcext:value-type="percentage">
            <text:p>100.0%</text:p>
          </table:table-cell>
          <table:table-cell table:number-columns-repeated="20"/>
        </table:table-row>
        <table:table-row table:style-name="ro1">
          <table:table-cell/>
          <table:table-cell table:style-name="ce399" office:value-type="string" calcext:value-type="string">
            <text:p>CVU = Costo variable Unitario para cada producto</text:p>
          </table:table-cell>
          <table:table-cell table:style-name="ce90"/>
          <table:table-cell table:style-name="ce423" table:number-columns-repeated="2"/>
          <table:table-cell table:style-name="ce442"/>
          <table:table-cell table:number-columns-repeated="20"/>
        </table:table-row>
        <table:table-row table:style-name="ro1">
          <table:table-cell/>
          <table:table-cell table:style-name="ce399" office:value-type="string" calcext:value-type="string">
            <text:p>MgCU = Margen de Contribución Unitario (PRECIO - CVU)</text:p>
          </table:table-cell>
          <table:table-cell table:style-name="ce90"/>
          <table:table-cell table:style-name="ce423" table:number-columns-repeated="2"/>
          <table:table-cell table:style-name="ce442"/>
          <table:table-cell table:formula="of:=(50*100)/150" office:value-type="float" office:value="33.3333333333333" calcext:value-type="float">
            <text:p>33.3333333333333</text:p>
          </table:table-cell>
          <table:table-cell table:number-columns-repeated="19"/>
        </table:table-row>
        <table:table-row table:style-name="ro1">
          <table:table-cell/>
          <table:table-cell table:style-name="ce400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MARGEN DE CONTRIBUCIÓN PROMEDIO PONDERADO</text:p>
          </table:table-cell>
          <table:covered-table-cell table:number-columns-repeated="3" table:style-name="ce98"/>
          <table:table-cell table:style-name="ce90"/>
          <table:table-cell table:number-columns-repeated="20"/>
        </table:table-row>
        <table:table-row table:style-name="ro13">
          <table:table-cell/>
          <table:table-cell table:style-name="ce90" table:number-columns-repeated="5"/>
          <table:table-cell table:number-columns-repeated="20"/>
        </table:table-row>
        <table:table-row table:style-name="ro6">
          <table:table-cell/>
          <table:table-cell table:style-name="ce395" office:value-type="string" calcext:value-type="string">
            <text:p>PRODUCTOS</text:p>
          </table:table-cell>
          <table:table-cell table:style-name="ce410" office:value-type="string" calcext:value-type="string">
            <text:p>MgCU</text:p>
          </table:table-cell>
          <table:table-cell table:style-name="ce410" office:value-type="string" calcext:value-type="string">
            <text:p>PESO</text:p>
          </table:table-cell>
          <table:table-cell table:style-name="ce432" office:value-type="string" calcext:value-type="string">
            <text:p>MgCU (*)</text:p>
            <text:p>ponderado</text:p>
          </table:table-cell>
          <table:table-cell table:number-columns-repeated="21"/>
        </table:table-row>
        <table:table-row table:style-name="ro1">
          <table:table-cell/>
          <table:table-cell table:style-name="ce401" office:value-type="string" calcext:value-type="string">
            <text:p>MODELO A</text:p>
          </table:table-cell>
          <table:table-cell table:style-name="ce411" table:formula="of:=[.C7]-[.D7]" office:value-type="float" office:value="48.9974897901235" calcext:value-type="float">
            <text:p>49.00</text:p>
          </table:table-cell>
          <table:table-cell table:style-name="ce424" table:formula="of:=[.F7]" office:value-type="percentage" office:value="0.400734538904633" calcext:value-type="percentage">
            <text:p>40.07 %</text:p>
          </table:table-cell>
          <table:table-cell table:style-name="ce433" table:formula="of:=[.C18]*[.D18]" office:value-type="float" office:value="19.6349864785296" calcext:value-type="float">
            <text:p>19.63</text:p>
          </table:table-cell>
          <table:table-cell table:number-columns-repeated="21"/>
        </table:table-row>
        <table:table-row table:style-name="ro1">
          <table:table-cell/>
          <table:table-cell table:style-name="ce315" office:value-type="string" calcext:value-type="string">
            <text:p>MODELO B</text:p>
          </table:table-cell>
          <table:table-cell table:style-name="ce411" table:formula="of:=[.C8]-[.D8]" office:value-type="float" office:value="43.9875342345682" calcext:value-type="float">
            <text:p>43.99</text:p>
          </table:table-cell>
          <table:table-cell table:style-name="ce424" table:formula="of:=[.F8]" office:value-type="percentage" office:value="0.314640920907556" calcext:value-type="percentage">
            <text:p>31.46 %</text:p>
          </table:table-cell>
          <table:table-cell table:style-name="ce433" table:formula="of:=[.C19]*[.D19]" office:value-type="float" office:value="13.8402782800172" calcext:value-type="float">
            <text:p>13.84</text:p>
          </table:table-cell>
          <table:table-cell table:number-columns-repeated="21"/>
        </table:table-row>
        <table:table-row table:style-name="ro1">
          <table:table-cell/>
          <table:table-cell table:style-name="ce315" office:value-type="string" calcext:value-type="string">
            <text:p>MODELO C</text:p>
          </table:table-cell>
          <table:table-cell table:style-name="ce411" table:formula="of:=[.C9]-[.D9]" office:value-type="float" office:value="42.2326009012348" calcext:value-type="float">
            <text:p>42.23</text:p>
          </table:table-cell>
          <table:table-cell table:style-name="ce425" table:formula="of:=[.F9]" office:value-type="percentage" office:value="0.284624540187811" calcext:value-type="percentage">
            <text:p>28.46 %</text:p>
          </table:table-cell>
          <table:table-cell table:style-name="ce433" table:formula="of:=[.C20]*[.D20]" office:value-type="float" office:value="12.0204346124493" calcext:value-type="float">
            <text:p>12.02</text:p>
          </table:table-cell>
          <table:table-cell table:number-columns-repeated="21"/>
        </table:table-row>
        <table:table-row table:style-name="ro1">
          <table:table-cell/>
          <table:table-cell table:style-name="ce176" office:value-type="string" calcext:value-type="string" table:number-columns-spanned="3" table:number-rows-spanned="1">
            <text:p>MgCU PONDERADO</text:p>
          </table:table-cell>
          <table:covered-table-cell table:number-columns-repeated="2" table:style-name="ce186"/>
          <table:table-cell table:style-name="ce434" table:formula="of:=SUM([.E18:.E20])" office:value-type="float" office:value="45.4956993709961" calcext:value-type="float">
            <text:p>45.50</text:p>
          </table:table-cell>
          <table:table-cell table:number-columns-repeated="21"/>
        </table:table-row>
        <table:table-row table:style-name="ro1">
          <table:table-cell/>
          <table:table-cell table:style-name="ce399" office:value-type="string" calcext:value-type="string">
            <text:p>MgCU = Margen de Contribución Unitario</text:p>
          </table:table-cell>
          <table:table-cell table:style-name="ce98" table:number-columns-repeated="2"/>
          <table:table-cell table:style-name="ce435"/>
          <table:table-cell table:style-name="ce204"/>
          <table:table-cell table:number-columns-repeated="20"/>
        </table:table-row>
        <table:table-row table:style-name="ro1">
          <table:table-cell/>
          <table:table-cell table:style-name="ce399" office:value-type="string" calcext:value-type="string">
            <text:p>(*) Se obtiene <text:s/>de MgCU* PESO</text:p>
          </table:table-cell>
          <table:table-cell table:style-name="ce98" table:number-columns-repeated="2"/>
          <table:table-cell table:style-name="ce435"/>
          <table:table-cell table:style-name="ce204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402" office:value-type="string" calcext:value-type="string">
            <text:p>PUNTO DE EQUILIBRIO TOTAL COMBINADO</text:p>
          </table:table-cell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403" office:value-type="string" calcext:value-type="string">
            <text:p><text:s text:c="3"/>PE =</text:p>
          </table:table-cell>
          <table:table-cell table:style-name="ce413" table:formula="of:=+[$'Costo unitario'.F10]" office:value-type="float" office:value="4861.97723765432" calcext:value-type="float">
            <text:p>4861.98</text:p>
          </table:table-cell>
          <table:table-cell table:style-name="ce426"/>
          <table:table-cell table:style-name="ce90" table:number-columns-repeated="2"/>
          <table:table-cell table:style-name="ce366"/>
          <table:table-cell/>
          <table:table-cell table:style-name="ce366"/>
          <table:table-cell table:number-columns-repeated="17"/>
        </table:table-row>
        <table:table-row table:style-name="ro1">
          <table:table-cell/>
          <table:table-cell table:style-name="ce90"/>
          <table:table-cell table:style-name="ce414" table:formula="of:=+[.E21]" office:value-type="float" office:value="45.4956993709961" calcext:value-type="float">
            <text:p>45.50</text:p>
          </table:table-cell>
          <table:table-cell table:style-name="ce90" table:number-columns-repeated="3"/>
          <table:table-cell table:style-name="ce366"/>
          <table:table-cell table:number-columns-repeated="19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403" office:value-type="string" calcext:value-type="string">
            <text:p>PE =</text:p>
          </table:table-cell>
          <table:table-cell table:style-name="ce415" table:formula="of:=+[.C27]/[.C28]" office:value-type="float" office:value="106.866743557609" calcext:value-type="float">
            <text:p>107</text:p>
          </table:table-cell>
          <table:table-cell table:style-name="ce209" office:value-type="string" calcext:value-type="string">
            <text:p>Unidades <text:s/>combinadas/mes</text:p>
          </table:table-cell>
          <table:table-cell table:style-name="ce90" table:number-columns-repeated="2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209" office:value-type="string" calcext:value-type="string">
            <text:p>El PE se calcula en función a las veces por el peso en % de C/U</text:p>
          </table:table-cell>
          <table:table-cell table:style-name="ce415"/>
          <table:table-cell table:style-name="ce90" table:number-columns-repeated="3"/>
          <table:table-cell table:number-columns-repeated="20"/>
        </table:table-row>
        <table:table-row table:style-name="ro1">
          <table:table-cell/>
          <table:table-cell table:style-name="ce402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404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416"/>
          <table:table-cell table:number-columns-repeated="20"/>
        </table:table-row>
        <table:table-row table:style-name="ro14">
          <table:table-cell/>
          <table:table-cell table:style-name="ce90" table:number-columns-repeated="5"/>
          <table:table-cell table:number-columns-repeated="20"/>
        </table:table-row>
        <table:table-row table:style-name="ro6">
          <table:table-cell/>
          <table:table-cell table:style-name="ce405" office:value-type="string" calcext:value-type="string">
            <text:p>PRODUCTOS</text:p>
          </table:table-cell>
          <table:table-cell table:style-name="ce417" office:value-type="string" calcext:value-type="string">
            <text:p>UNIDAD</text:p>
            <text:p>DE MEDIDA</text:p>
          </table:table-cell>
          <table:table-cell table:style-name="ce417" office:value-type="string" calcext:value-type="string">
            <text:p>CANTIDAD ANUAL</text:p>
          </table:table-cell>
          <table:table-cell table:style-name="ce417" office:value-type="string" calcext:value-type="string">
            <text:p>CANTIDAD MENSUAL</text:p>
          </table:table-cell>
          <table:table-cell table:style-name="ce443" office:value-type="string" calcext:value-type="string">
            <text:p>CANTIDAD DIARIA</text:p>
          </table:table-cell>
          <table:table-cell table:number-columns-repeated="20"/>
        </table:table-row>
        <table:table-row table:style-name="ro1">
          <table:table-cell/>
          <table:table-cell table:style-name="ce406" office:value-type="string" calcext:value-type="string">
            <text:p>A</text:p>
          </table:table-cell>
          <table:table-cell table:style-name="ce418" office:value-type="string" calcext:value-type="string">
            <text:p>Unidad</text:p>
          </table:table-cell>
          <table:table-cell table:style-name="ce427" table:formula="of:=[.E37]*12" office:value-type="float" office:value="513.902342445578" calcext:value-type="float">
            <text:p>514</text:p>
          </table:table-cell>
          <table:table-cell table:style-name="ce436" table:formula="of:=[.C30]*[.D18]" office:value-type="float" office:value="42.8251952037981" calcext:value-type="float">
            <text:p>43</text:p>
          </table:table-cell>
          <table:table-cell table:style-name="ce436" table:formula="of:=[.E37]/26" office:value-type="float" office:value="1.64712289245377" calcext:value-type="float">
            <text:p>2</text:p>
          </table:table-cell>
          <table:table-cell table:style-name="ce366"/>
          <table:table-cell table:number-columns-repeated="15"/>
          <table:table-cell table:style-name="ce362" office:value-type="string" calcext:value-type="string">
            <text:p>e.)</text:p>
          </table:table-cell>
          <table:table-cell table:style-name="ce402" office:value-type="string" calcext:value-type="string">
            <text:p>Punto de equilibrio contable</text:p>
          </table:table-cell>
          <table:table-cell table:style-name="ce90" table:number-columns-repeated="2"/>
        </table:table-row>
        <table:table-row table:style-name="ro1">
          <table:table-cell/>
          <table:table-cell table:style-name="ce406" office:value-type="string" calcext:value-type="string">
            <text:p>B</text:p>
          </table:table-cell>
          <table:table-cell table:style-name="ce418" office:value-type="string" calcext:value-type="string">
            <text:p>Unidad</text:p>
          </table:table-cell>
          <table:table-cell table:style-name="ce427" table:formula="of:=[.E38]*12" office:value-type="float" office:value="403.495807288294" calcext:value-type="float">
            <text:p>403</text:p>
          </table:table-cell>
          <table:table-cell table:style-name="ce436" table:formula="of:=+[.$C$30]*[.F8]" office:value-type="float" office:value="33.6246506073578" calcext:value-type="float">
            <text:p>34</text:p>
          </table:table-cell>
          <table:table-cell table:style-name="ce436" table:formula="of:=[.E38]/26" office:value-type="float" office:value="1.29325579259069" calcext:value-type="float">
            <text:p>1</text:p>
          </table:table-cell>
          <table:table-cell table:style-name="ce366"/>
          <table:table-cell table:number-columns-repeated="16"/>
          <table:table-cell table:style-name="ce90" table:number-columns-repeated="3"/>
        </table:table-row>
        <table:table-row table:style-name="ro1">
          <table:table-cell/>
          <table:table-cell table:style-name="ce407" office:value-type="string" calcext:value-type="string">
            <text:p>C</text:p>
          </table:table-cell>
          <table:table-cell table:style-name="ce419" office:value-type="string" calcext:value-type="string">
            <text:p>Unidad</text:p>
          </table:table-cell>
          <table:table-cell table:style-name="ce427" table:formula="of:=[.E39]*12" office:value-type="float" office:value="365.002772957439" calcext:value-type="float">
            <text:p>365</text:p>
          </table:table-cell>
          <table:table-cell table:style-name="ce436" table:formula="of:=+[.$C$30]*[.F9]" office:value-type="float" office:value="30.4168977464533" calcext:value-type="float">
            <text:p>30</text:p>
          </table:table-cell>
          <table:table-cell table:style-name="ce436" table:formula="of:=[.E39]/26" office:value-type="float" office:value="1.16988068255589" calcext:value-type="float">
            <text:p>1</text:p>
          </table:table-cell>
          <table:table-cell table:style-name="ce366"/>
          <table:table-cell table:number-columns-repeated="16"/>
          <table:table-cell table:style-name="ce209" office:value-type="string" calcext:value-type="string">
            <text:p>Costo fijo total</text:p>
          </table:table-cell>
          <table:table-cell table:style-name="ce423" office:value-type="float" office:value="2133.99035493827" calcext:value-type="float">
            <text:p>2133.99</text:p>
          </table:table-cell>
          <table:table-cell table:style-name="ce90"/>
        </table:table-row>
        <table:table-row table:style-name="ro1">
          <table:table-cell/>
          <table:table-cell table:style-name="ce408" office:value-type="string" calcext:value-type="string" table:number-columns-spanned="2" table:number-rows-spanned="1">
            <text:p>TOTAL</text:p>
          </table:table-cell>
          <table:covered-table-cell table:style-name="ce420"/>
          <table:table-cell table:style-name="ce428" table:formula="of:=SUM([.D37:.D39])" office:value-type="float" office:value="1282.40092269131" calcext:value-type="float">
            <text:p>1282</text:p>
          </table:table-cell>
          <table:table-cell table:style-name="ce428" table:formula="of:=SUM([.E37:.E39])" office:value-type="float" office:value="106.866743557609" calcext:value-type="float">
            <text:p>107</text:p>
          </table:table-cell>
          <table:table-cell table:style-name="ce428" table:formula="of:=SUM([.F37:.F39])" office:value-type="float" office:value="4.11025936760036" calcext:value-type="float">
            <text:p>4</text:p>
          </table:table-cell>
          <table:table-cell table:style-name="ce366"/>
          <table:table-cell table:number-columns-repeated="16"/>
          <table:table-cell table:style-name="ce209" office:value-type="string" calcext:value-type="string">
            <text:p>Precio de venta</text:p>
          </table:table-cell>
          <table:table-cell table:style-name="ce423" office:value-type="float" office:value="154.8" calcext:value-type="float">
            <text:p>154.80</text:p>
          </table:table-cell>
          <table:table-cell table:style-name="ce90"/>
        </table:table-row>
        <table:table-row table:style-name="ro1">
          <table:table-cell/>
          <table:table-cell table:style-name="ce90" table:number-columns-repeated="5"/>
          <table:table-cell table:number-columns-repeated="17"/>
          <table:table-cell table:style-name="ce209" office:value-type="string" calcext:value-type="string">
            <text:p>Costo variable unitario</text:p>
          </table:table-cell>
          <table:table-cell table:style-name="ce222" office:value-type="float" office:value="104.851070555556" calcext:value-type="float">
            <text:p>104.85</text:p>
          </table:table-cell>
          <table:table-cell table:style-name="ce90"/>
        </table:table-row>
        <table:table-row table:style-name="ro1">
          <table:table-cell/>
          <table:table-cell table:style-name="ce404" office:value-type="string" calcext:value-type="string" table:number-columns-spanned="5" table:number-rows-spanned="1">
            <text:p>PUNTO DE EQUILIBRIO EN DOLARES <text:s/>POR PRODUCTO</text:p>
          </table:table-cell>
          <table:covered-table-cell table:number-columns-repeated="4" table:style-name="ce416"/>
          <table:table-cell table:number-columns-repeated="17"/>
          <table:table-cell table:style-name="ce402" office:value-type="string" calcext:value-type="string">
            <text:p>Margen de contribución</text:p>
          </table:table-cell>
          <table:table-cell table:style-name="ce445" table:formula="of:=+[.Y40]-[.Y41]" office:value-type="float" office:value="49.9489294444444" calcext:value-type="float">
            <text:p>49.95</text:p>
          </table:table-cell>
          <table:table-cell table:style-name="ce90"/>
        </table:table-row>
        <table:table-row table:style-name="ro15">
          <table:table-cell/>
          <table:table-cell table:style-name="ce90" table:number-columns-repeated="5"/>
          <table:table-cell/>
          <table:table-cell table:style-name="ce444"/>
          <table:table-cell table:number-columns-repeated="15"/>
          <table:table-cell table:style-name="ce90" table:number-columns-repeated="3"/>
        </table:table-row>
        <table:table-row table:style-name="ro6">
          <table:table-cell/>
          <table:table-cell table:style-name="ce405" office:value-type="string" calcext:value-type="string">
            <text:p>PRODUCTOS</text:p>
          </table:table-cell>
          <table:table-cell table:style-name="ce417" office:value-type="string" calcext:value-type="string">
            <text:p>PRECIO</text:p>
          </table:table-cell>
          <table:table-cell table:style-name="ce417" office:value-type="string" calcext:value-type="string">
            <text:p>DOLARES POR AÑO</text:p>
          </table:table-cell>
          <table:table-cell table:style-name="ce417" office:value-type="string" calcext:value-type="string">
            <text:p>DOLARES POR MES</text:p>
          </table:table-cell>
          <table:table-cell table:style-name="ce443" office:value-type="string" calcext:value-type="string">
            <text:p>DOLARES POR DIA</text:p>
          </table:table-cell>
          <table:table-cell table:number-columns-repeated="17"/>
          <table:table-cell table:style-name="ce402" office:value-type="string" calcext:value-type="string">
            <text:p>Punto de equilibrio</text:p>
          </table:table-cell>
          <table:table-cell table:style-name="ce446" table:formula="of:=[.Y39]/[.Y42]" office:value-type="float" office:value="42.7234453005003" calcext:value-type="float">
            <text:p>43</text:p>
          </table:table-cell>
          <table:table-cell table:style-name="ce448" office:value-type="string" calcext:value-type="string">
            <text:p>Unidades/mes</text:p>
          </table:table-cell>
        </table:table-row>
        <table:table-row table:style-name="ro1">
          <table:table-cell/>
          <table:table-cell table:style-name="ce406" office:value-type="string" calcext:value-type="string">
            <text:p>A</text:p>
          </table:table-cell>
          <table:table-cell table:style-name="ce421" table:formula="of:=[.C7]" office:value-type="float" office:value="141.536960345679" calcext:value-type="float">
            <text:p>141.54</text:p>
          </table:table-cell>
          <table:table-cell table:style-name="ce429" table:formula="of:=[.C45]*[.D37]" office:value-type="float" office:value="72736.1754642713" calcext:value-type="float">
            <text:p>72,736.18 <text:s text:c="2"/></text:p>
          </table:table-cell>
          <table:table-cell table:style-name="ce437" table:formula="of:=[.E37]*[.C45]" office:value-type="float" office:value="6061.34795535594" calcext:value-type="float">
            <text:p>6,061.35 <text:s text:c="2"/></text:p>
          </table:table-cell>
          <table:table-cell table:style-name="ce437" table:formula="of:=[.F37]*[.C45]" office:value-type="float" office:value="233.12876751369" calcext:value-type="float">
            <text:p>233.13 <text:s text:c="2"/></text:p>
          </table:table-cell>
          <table:table-cell table:number-columns-repeated="17"/>
          <table:table-cell table:style-name="ce209"/>
          <table:table-cell table:style-name="ce423"/>
          <table:table-cell table:style-name="ce90"/>
        </table:table-row>
        <table:table-row table:style-name="ro1">
          <table:table-cell/>
          <table:table-cell table:style-name="ce406" office:value-type="string" calcext:value-type="string">
            <text:p>B</text:p>
          </table:table-cell>
          <table:table-cell table:style-name="ce421" table:formula="of:=[.C8]" office:value-type="float" office:value="111.129227012346" calcext:value-type="float">
            <text:p>111.13</text:p>
          </table:table-cell>
          <table:table-cell table:style-name="ce429" table:formula="of:=[.C46]*[.D38]" office:value-type="float" office:value="44840.1771666706" calcext:value-type="float">
            <text:p>44,840.18 <text:s text:c="2"/></text:p>
          </table:table-cell>
          <table:table-cell table:style-name="ce437" table:formula="of:=[.E38]*[.C46]" office:value-type="float" office:value="3736.68143055588" calcext:value-type="float">
            <text:p>3,736.68 <text:s text:c="2"/></text:p>
          </table:table-cell>
          <table:table-cell table:style-name="ce437" table:formula="of:=[.F38]*[.C46]" office:value-type="float" office:value="143.718516559842" calcext:value-type="float">
            <text:p>143.72 <text:s text:c="2"/></text:p>
          </table:table-cell>
          <table:table-cell table:number-columns-repeated="17"/>
          <table:table-cell table:style-name="ce402" office:value-type="string" calcext:value-type="string">
            <text:p>Punto de equilibrio</text:p>
          </table:table-cell>
          <table:table-cell table:style-name="ce447" table:formula="of:=[.Y44]*[.Y40]" office:value-type="float" office:value="6613.58933251745" calcext:value-type="float">
            <text:p>6613.59</text:p>
          </table:table-cell>
          <table:table-cell table:style-name="ce90" office:value-type="string" calcext:value-type="string">
            <text:p>soles/mes</text:p>
          </table:table-cell>
        </table:table-row>
        <table:table-row table:style-name="ro1">
          <table:table-cell/>
          <table:table-cell table:style-name="ce407" office:value-type="string" calcext:value-type="string">
            <text:p>C</text:p>
          </table:table-cell>
          <table:table-cell table:style-name="ce421" table:formula="of:=[.C9]" office:value-type="float" office:value="100.527627012346" calcext:value-type="float">
            <text:p>100.53</text:p>
          </table:table-cell>
          <table:table-cell table:style-name="ce430" table:formula="of:=[.C47]*[.D39]" office:value-type="float" office:value="36692.8626183375" calcext:value-type="float">
            <text:p>36,692.86 <text:s text:c="2"/></text:p>
          </table:table-cell>
          <table:table-cell table:style-name="ce438" table:formula="of:=[.E39]*[.C47]" office:value-type="float" office:value="3057.73855152812" calcext:value-type="float">
            <text:p>3,057.74 <text:s text:c="2"/></text:p>
          </table:table-cell>
          <table:table-cell table:style-name="ce438" table:formula="of:=[.F39]*[.C47]" office:value-type="float" office:value="117.605328904928" calcext:value-type="float">
            <text:p>117.61 <text:s text:c="2"/></text:p>
          </table:table-cell>
          <table:table-cell table:number-columns-repeated="20"/>
        </table:table-row>
        <table:table-row table:style-name="ro1">
          <table:table-cell/>
          <table:table-cell table:style-name="ce408" office:value-type="string" calcext:value-type="string" table:number-columns-spanned="2" table:number-rows-spanned="1">
            <text:p>TOTAL</text:p>
          </table:table-cell>
          <table:covered-table-cell table:style-name="ce420"/>
          <table:table-cell table:style-name="ce431" table:formula="of:=SUM([.D45:.D47])" office:value-type="float" office:value="154269.215249279" calcext:value-type="float">
            <text:p>154,269.22 <text:s text:c="2"/></text:p>
          </table:table-cell>
          <table:table-cell table:style-name="ce431" table:formula="of:=SUM([.E45:.E47])" office:value-type="float" office:value="12855.7679374399" calcext:value-type="float">
            <text:p>12,855.77 <text:s text:c="2"/></text:p>
          </table:table-cell>
          <table:table-cell table:style-name="ce431" table:formula="of:=SUM([.F45:.F47])" office:value-type="float" office:value="494.452612978459" calcext:value-type="float">
            <text:p>494.45 <text:s text:c="2"/></text:p>
          </table:table-cell>
          <table:table-cell table:number-columns-repeated="20"/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stado de resultados" table:style-name="ta14">
        <table:table-column table:style-name="co1" table:default-cell-style-name="Default"/>
        <table:table-column table:style-name="co50" table:default-cell-style-name="ce315"/>
        <table:table-column table:style-name="co51" table:default-cell-style-name="ce457"/>
        <table:table-column table:style-name="co12" table:default-cell-style-name="ce457"/>
        <table:table-column table:style-name="co52" table:default-cell-style-name="ce457"/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449" office:value-type="string" calcext:value-type="string" table:number-columns-spanned="4" table:number-rows-spanned="1">
            <text:p>ESTADO DE RESULTADOS ECONÓMICO REAL EN DOLARES</text:p>
          </table:table-cell>
          <table:covered-table-cell table:number-columns-repeated="3" table:style-name="ce409"/>
          <table:table-cell table:number-columns-repeated="16379"/>
        </table:table-row>
        <table:table-row table:style-name="ro1">
          <table:table-cell/>
          <table:table-cell table:style-name="ce90" table:number-columns-repeated="4"/>
          <table:table-cell table:number-columns-repeated="16379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REGIMEN TRIBUTARIO MYPE TRIBUTARIO </text:p>
          </table:table-cell>
          <table:covered-table-cell table:number-columns-repeated="3" table:style-name="ce98"/>
          <table:table-cell table:number-columns-repeated="16379"/>
        </table:table-row>
        <table:table-row table:style-name="ro1">
          <table:table-cell/>
          <table:table-cell table:style-name="ce90" table:number-columns-repeated="4"/>
          <table:table-cell table:number-columns-repeated="16379"/>
        </table:table-row>
        <table:table-row table:style-name="ro1">
          <table:table-cell/>
          <table:table-cell table:style-name="ce450" office:value-type="string" calcext:value-type="string">
            <text:p>RUBRO</text:p>
          </table:table-cell>
          <table:table-cell table:style-name="ce455" office:value-type="float" office:value="1" calcext:value-type="float">
            <text:p>1</text:p>
          </table:table-cell>
          <table:table-cell table:style-name="ce455" table:formula="of:=1+[.C6]" office:value-type="float" office:value="2" calcext:value-type="float">
            <text:p>2</text:p>
          </table:table-cell>
          <table:table-cell table:style-name="ce455" table:formula="of:=1+[.D6]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207" office:value-type="string" calcext:value-type="string">
            <text:p>Ventas precios FOB</text:p>
          </table:table-cell>
          <table:table-cell table:style-name="ce456" table:formula="of:=+[$'Presupuesto de ventas'.P25]" office:value-type="float" office:value="211916.288622223" calcext:value-type="float">
            <text:p>211,916.29 <text:s text:c="2"/></text:p>
          </table:table-cell>
          <table:table-cell table:style-name="ce456" table:formula="of:=+[$'Presupuesto de ventas'.P29]" office:value-type="float" office:value="219186.608642963" calcext:value-type="float">
            <text:p>219,186.61 <text:s text:c="2"/></text:p>
          </table:table-cell>
          <table:table-cell table:style-name="ce456" table:formula="of:=+[$'Presupuesto de ventas'.P33]" office:value-type="float" office:value="230203.142436149" calcext:value-type="float">
            <text:p>230,203.14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-) Costo de ventas</text:p>
          </table:table-cell>
          <table:table-cell table:number-columns-repeated="16382"/>
        </table:table-row>
        <table:table-row table:style-name="ro1">
          <table:table-cell/>
          <table:table-cell table:style-name="ce321" office:value-type="string" calcext:value-type="string">
            <text:p>Costos de produccion</text:p>
          </table:table-cell>
          <table:table-cell table:style-name="ce437" table:formula="of:=+-[$'Costo de producción'.C41]" office:value-type="float" office:value="-130785.713666667" calcext:value-type="float">
            <text:p>-130,785.71 <text:s text:c="2"/></text:p>
          </table:table-cell>
          <table:table-cell table:style-name="ce437" table:formula="of:=+-[$'Costo de producción'.D41]" office:value-type="float" office:value="-135317.6019" calcext:value-type="float">
            <text:p>-135,317.60 <text:s text:c="2"/></text:p>
          </table:table-cell>
          <table:table-cell table:style-name="ce437" table:formula="of:=+-[$'Costo de producción'.E41]" office:value-type="float" office:value="-142054.271073333" calcext:value-type="float">
            <text:p>-142,054.27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preciacion Activo Fijo</text:p>
          </table:table-cell>
          <table:table-cell table:style-name="ce437" table:formula="of:=-[$Depreciación.$F$9]" office:value-type="float" office:value="-3289.4212962963" calcext:value-type="float">
            <text:p>-3,289.42 <text:s text:c="2"/></text:p>
          </table:table-cell>
          <table:table-cell table:style-name="ce437" table:formula="of:=-[$Depreciación.$F$9]" office:value-type="float" office:value="-3289.4212962963" calcext:value-type="float">
            <text:p>-3,289.42 <text:s text:c="2"/></text:p>
          </table:table-cell>
          <table:table-cell table:style-name="ce437" table:formula="of:=-[$Depreciación.$F$9]" office:value-type="float" office:value="-3289.4212962963" calcext:value-type="float">
            <text:p>-3,289.42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14" office:value-type="string" calcext:value-type="string">
            <text:p>Utilidad Bruta</text:p>
          </table:table-cell>
          <table:table-cell table:formula="of:=+[.C7]+[.C9]+[.C10]" office:value-type="float" office:value="77841.1536592596" calcext:value-type="float">
            <text:p>77,841.15 <text:s text:c="2"/></text:p>
          </table:table-cell>
          <table:table-cell table:formula="of:=+[.D7]+[.D9]+[.D10]" office:value-type="float" office:value="80579.585446667" calcext:value-type="float">
            <text:p>80,579.59 <text:s text:c="2"/></text:p>
          </table:table-cell>
          <table:table-cell table:formula="of:=+[.E7]+[.E9]+[.E10]" office:value-type="float" office:value="84859.4500665189" calcext:value-type="float">
            <text:p>84,859.45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-) Gastos operativos</text:p>
          </table:table-cell>
          <table:table-cell table:number-columns-repeated="16382"/>
        </table:table-row>
        <table:table-row table:style-name="ro1">
          <table:table-cell/>
          <table:table-cell table:style-name="ce321" office:value-type="string" calcext:value-type="string">
            <text:p>Gastos administrativos</text:p>
          </table:table-cell>
          <table:table-cell table:style-name="ce437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style-name="ce437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style-name="ce437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21" office:value-type="string" calcext:value-type="string">
            <text:p>Gastos de ventas</text:p>
          </table:table-cell>
          <table:table-cell table:style-name="ce437" table:formula="of:=-[$'Gastos operativos'.$H$20]*12" office:value-type="float" office:value="-21290" calcext:value-type="float">
            <text:p>-21,290.00 <text:s text:c="2"/></text:p>
          </table:table-cell>
          <table:table-cell table:style-name="ce437" table:formula="of:=-[$'Gastos operativos'.$H$20]*12" office:value-type="float" office:value="-21290" calcext:value-type="float">
            <text:p>-21,290.00 <text:s text:c="2"/></text:p>
          </table:table-cell>
          <table:table-cell table:style-name="ce437" table:formula="of:=-[$'Gastos operativos'.$H$20]*12" office:value-type="float" office:value="-21290" calcext:value-type="float">
            <text:p>-21,290.00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21" office:value-type="string" calcext:value-type="string">
            <text:p>Amortizacion de intangibles</text:p>
          </table:table-cell>
          <table:table-cell table:style-name="ce437" table:formula="of:=-[$'Gastos operativos'.$H$13]*12" office:value-type="float" office:value="-64.3055555555555" calcext:value-type="float">
            <text:p>-64.31 <text:s text:c="2"/></text:p>
          </table:table-cell>
          <table:table-cell table:style-name="ce437" table:formula="of:=-[$'Gastos operativos'.$H$13]*12" office:value-type="float" office:value="-64.3055555555555" calcext:value-type="float">
            <text:p>-64.31 <text:s text:c="2"/></text:p>
          </table:table-cell>
          <table:table-cell table:style-name="ce437" table:formula="of:=-[$'Gastos operativos'.$H$13]*12" office:value-type="float" office:value="-64.3055555555555" calcext:value-type="float">
            <text:p>-64.31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14" office:value-type="string" calcext:value-type="string">
            <text:p>Utilidad Operativa</text:p>
          </table:table-cell>
          <table:table-cell table:formula="of:=SUM([.C11:.C15])" office:value-type="float" office:value="22786.8481037041" calcext:value-type="float">
            <text:p>22,786.85 <text:s text:c="2"/></text:p>
          </table:table-cell>
          <table:table-cell table:formula="of:=SUM([.D11:.D15])" office:value-type="float" office:value="25525.2798911115" calcext:value-type="float">
            <text:p>25,525.28 <text:s text:c="2"/></text:p>
          </table:table-cell>
          <table:table-cell table:formula="of:=SUM([.E11:.E15])" office:value-type="float" office:value="29805.1445109634" calcext:value-type="float">
            <text:p>29,805.14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ntereses</text:p>
          </table:table-cell>
          <table:table-cell table:number-columns-repeated="3" table:style-name="ce325" office:value-type="float" office:value="0" calcext:value-type="float">
            <text:p>0.00</text:p>
          </table:table-cell>
          <table:table-cell table:number-columns-repeated="16379"/>
        </table:table-row>
        <table:table-row table:style-name="ro1">
          <table:table-cell/>
          <table:table-cell table:style-name="ce314" office:value-type="string" calcext:value-type="string">
            <text:p>Utilidad Imponible</text:p>
          </table:table-cell>
          <table:table-cell table:formula="of:=+[.C17]+[.C16]" office:value-type="float" office:value="22786.8481037041" calcext:value-type="float">
            <text:p>22,786.85 <text:s text:c="2"/></text:p>
          </table:table-cell>
          <table:table-cell table:formula="of:=+[.D17]+[.D16]" office:value-type="float" office:value="25525.2798911115" calcext:value-type="float">
            <text:p>25,525.28 <text:s text:c="2"/></text:p>
          </table:table-cell>
          <table:table-cell table:formula="of:=+[.E17]+[.E16]" office:value-type="float" office:value="29805.1445109634" calcext:value-type="float">
            <text:p>29,805.14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76" office:value-type="string" calcext:value-type="string">
            <text:p>Impuesto a la renta (*)</text:p>
          </table:table-cell>
          <table:table-cell table:style-name="ce458" table:formula="of:=+-([.$B$23]*[.$B$24]+([.C18]-[.$B$23])*[.$C$24])" office:value-type="float" office:value="-3147.1201905927" calcext:value-type="float">
            <text:p>-3,147.12 <text:s text:c="2"/></text:p>
          </table:table-cell>
          <table:table-cell table:style-name="ce458" table:formula="of:=+-([.$B$23]*[.$B$24]+([.D18]-[.$B$23])*[.$C$24])" office:value-type="float" office:value="-3954.95756787789" calcext:value-type="float">
            <text:p>-3,954.96 <text:s text:c="2"/></text:p>
          </table:table-cell>
          <table:table-cell table:style-name="ce458" table:formula="of:=+-([.$B$23]*[.$B$24]+([.E18]-[.$B$23])*[.$C$24])" office:value-type="float" office:value="-5217.5176307342" calcext:value-type="float">
            <text:p>-5,217.52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451" office:value-type="string" calcext:value-type="string">
            <text:p>Utilidad Neta</text:p>
          </table:table-cell>
          <table:table-cell table:style-name="ce459" table:formula="of:=[.C18]+[.C19]" office:value-type="float" office:value="19639.7279131114" calcext:value-type="float">
            <text:p>19,639.73 <text:s text:c="2"/></text:p>
          </table:table-cell>
          <table:table-cell table:style-name="ce459" table:formula="of:=[.D18]+[.D19]" office:value-type="float" office:value="21570.3223232336" calcext:value-type="float">
            <text:p>21,570.32 <text:s text:c="2"/></text:p>
          </table:table-cell>
          <table:table-cell table:style-name="ce459" table:formula="of:=[.E18]+[.E19]" office:value-type="float" office:value="24587.6268802292" calcext:value-type="float">
            <text:p>24,587.63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452" office:value-type="string" calcext:value-type="string">
            <text:p>(*) Sueldos en régimen labora pequeña empresa</text:p>
          </table:table-cell>
          <table:table-cell table:style-name="ce460" table:number-columns-repeated="3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(**) Régimen tributario MYPE Tributario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453" table:formula="of:=66000/[$Resumen.C20]" office:value-type="float" office:value="18333.3333333333" calcext:value-type="float">
            <text:p>18333.33</text:p>
          </table:table-cell>
          <table:table-cell table:style-name="ce324" office:value-type="string" calcext:value-type="string">
            <text:p><text:s/>mas de 18333.33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table:style-name="ce454" office:value-type="percentage" office:value="0.1" calcext:value-type="percentage">
            <text:p>10 %</text:p>
          </table:table-cell>
          <table:table-cell table:style-name="ce425" office:value-type="percentage" office:value="0.295" calcext:value-type="percentage">
            <text:p>29.50 %</text:p>
          </table:table-cell>
          <table:table-cell table:style-name="Default" table:number-columns-repeated="2"/>
          <table:table-cell table:number-columns-repeated="16379"/>
        </table:table-row>
      </table:table>
      <table:table table:name="Costo_Deuda" table:style-name="ta15">
        <table:table-column table:style-name="co1" table:default-cell-style-name="Default"/>
        <table:table-column table:style-name="co53" table:default-cell-style-name="Default"/>
        <table:table-column table:style-name="co1" table:default-cell-style-name="ce463"/>
        <table:table-column table:style-name="co54" table:default-cell-style-name="ce467"/>
        <table:table-column table:style-name="co55" table:default-cell-style-name="ce436"/>
        <table:table-column table:style-name="co29" table:default-cell-style-name="ce475"/>
        <table:table-column table:style-name="co13" table:default-cell-style-name="ce436"/>
        <table:table-column table:style-name="co1" table:default-cell-style-name="ce479"/>
        <table:table-column table:style-name="co1" table:number-columns-repeated="249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" table:number-columns-repeated="249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362" office:value-type="string" calcext:value-type="string">
            <text:p>c.) Tabla de amortizacion de la deuda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Prestamo =</text:p>
          </table:table-cell>
          <table:table-cell table:style-name="ce423" table:formula="of:=[$'Inversión inicial'.H64]" office:value-type="float" office:value="12638.9483611111" calcext:value-type="float">
            <text:p>12638.95</text:p>
          </table:table-cell>
          <table:table-cell table:style-name="ce90" table:number-columns-repeated="3"/>
          <table:table-cell table:style-name="ce366"/>
          <table:table-cell table:number-columns-repeated="16375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TEA</text:p>
          </table:table-cell>
          <table:table-cell table:style-name="ce469" table:formula="of:=+[$Resumen.C10]" office:value-type="percentage" office:value="0.174" calcext:value-type="percentage">
            <text:p>17.40 %</text:p>
          </table:table-cell>
          <table:table-cell table:style-name="ce90" table:number-columns-repeated="3"/>
          <table:table-cell/>
          <table:table-cell table:style-name="ce228" office:value-type="string" calcext:value-type="string">
            <text:p>tasa efectiva anu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TEM</text:p>
          </table:table-cell>
          <table:table-cell table:style-name="ce469" table:formula="of:=POWER((1+[.E4]);(1/[.F9]))-1" office:value-type="percentage" office:value="0.013457812123618" calcext:value-type="percentage">
            <text:p>1.35 %</text:p>
          </table:table-cell>
          <table:table-cell table:style-name="ce209" table:number-columns-repeated="2"/>
          <table:table-cell table:style-name="ce90"/>
          <table:table-cell/>
          <table:table-cell table:style-name="ce228" office:value-type="string" calcext:value-type="string">
            <text:p>tasa efectiva mensu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Devaluacion $ =</text:p>
          </table:table-cell>
          <table:table-cell table:style-name="ce442" table:formula="of:=[$Resumen.C6]" office:value-type="percentage" office:value="0.0277777777777778" calcext:value-type="percentage">
            <text:p>2.8%</text:p>
          </table:table-cell>
          <table:table-cell table:style-name="ce209" table:number-columns-repeated="2"/>
          <table:table-cell table:style-name="ce90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Devaluación Mes =</text:p>
          </table:table-cell>
          <table:table-cell table:style-name="ce470" table:formula="of:=POWER((1+[.E6]);(1/[.F9]))-1" office:value-type="percentage" office:value="0.00228585644435841" calcext:value-type="percentage">
            <text:p>0.23 %</text:p>
          </table:table-cell>
          <table:table-cell table:style-name="ce209"/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TEM real =</text:p>
          </table:table-cell>
          <table:table-cell table:style-name="ce470" table:formula="of:=((1+[.E5])/(1+[.E7]))-1" office:value-type="percentage" office:value="0.0111464764342704" calcext:value-type="percentage">
            <text:p>1.11 %</text:p>
          </table:table-cell>
          <table:table-cell table:style-name="ce209"/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n =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12" calcext:value-type="float">
            <text:p>12</text:p>
          </table:table-cell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209" office:value-type="string" calcext:value-type="string">
            <text:p>Cuota <text:s/>=</text:p>
          </table:table-cell>
          <table:table-cell table:style-name="ce471" table:formula="of:=PMT([.E8];[.E9];[.E3])" office:value-type="float" office:value="-603.111863705631" calcext:value-type="float">
            <text:p>-603.1</text:p>
          </table:table-cell>
          <table:table-cell table:style-name="ce90" table:number-columns-repeated="3"/>
          <table:table-cell table:number-columns-repeated="16376"/>
        </table:table-row>
        <table:table-row table:style-name="ro1">
          <table:table-cell/>
          <table:table-cell table:style-name="ce90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461" office:value-type="string" calcext:value-type="string">
            <text:p>Trimestres</text:p>
          </table:table-cell>
          <table:table-cell table:style-name="ce465" office:value-type="string" calcext:value-type="string">
            <text:p>Saldo inicial</text:p>
          </table:table-cell>
          <table:table-cell table:style-name="ce465" office:value-type="string" calcext:value-type="string">
            <text:p>Interes</text:p>
          </table:table-cell>
          <table:table-cell table:style-name="ce465" office:value-type="string" calcext:value-type="string">
            <text:p>CAPITAL</text:p>
          </table:table-cell>
          <table:table-cell table:style-name="ce465" office:value-type="string" calcext:value-type="string">
            <text:p>CUOTA</text:p>
          </table:table-cell>
          <table:table-cell table:style-name="ce477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62" office:value-type="string" calcext:value-type="string">
            <text:p>Tota Año 1</text:p>
          </table:table-cell>
          <table:table-cell table:style-name="ce466"/>
          <table:table-cell table:style-name="ce472" table:formula="of:=SUM([.E14:.E25])" office:value-type="float" office:value="1337.55066380761" calcext:value-type="float">
            <text:p>1338</text:p>
          </table:table-cell>
          <table:table-cell table:style-name="ce474" table:formula="of:=SUM([.F14:.F25])" office:value-type="float" office:value="5899.79170065996" calcext:value-type="float">
            <text:p>5899.8</text:p>
          </table:table-cell>
          <table:table-cell table:style-name="ce472" table:formula="of:=SUM([.G14:.G25])" office:value-type="float" office:value="7237.34236446757" calcext:value-type="float">
            <text:p>7237</text:p>
          </table:table-cell>
          <table:table-cell table:style-name="ce478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12638.9483611111" calcext:value-type="float">
            <text:p>12639</text:p>
          </table:table-cell>
          <table:table-cell table:formula="of:=[.D14]*[.$E$8]" office:value-type="float" office:value="140.879740061085" calcext:value-type="float">
            <text:p>141</text:p>
          </table:table-cell>
          <table:table-cell table:formula="of:=[.G14]-[.E14]" office:value-type="float" office:value="462.232123644546" calcext:value-type="float">
            <text:p>462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4]-[.F14]" office:value-type="float" office:value="12176.7162374666" calcext:value-type="float">
            <text:p>12177</text:p>
          </table:table-cell>
          <table:table-cell/>
          <table:table-cell table:style-name="ce444"/>
          <table:table-cell table:style-name="ce480" table:formula="of:=SUM([.F14:.F25])" office:value-type="float" office:value="5899.79170065996" calcext:value-type="float">
            <text:p>5899.8</text:p>
          </table:table-cell>
          <table:table-cell table:style-name="ce228" office:value-type="string" calcext:value-type="string">
            <text:p>Capital 12 mese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[.C14]+1" office:value-type="float" office:value="2" calcext:value-type="float">
            <text:p>2</text:p>
          </table:table-cell>
          <table:table-cell table:formula="of:=[.H14]" office:value-type="float" office:value="12176.7162374666" calcext:value-type="float">
            <text:p>12177</text:p>
          </table:table-cell>
          <table:table-cell table:formula="of:=[.D15]*[.$E$8]" office:value-type="float" office:value="135.727480587718" calcext:value-type="float">
            <text:p>136</text:p>
          </table:table-cell>
          <table:table-cell table:formula="of:=[.G15]-[.E15]" office:value-type="float" office:value="467.384383117913" calcext:value-type="float">
            <text:p>467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5]-[.F15]" office:value-type="float" office:value="11709.3318543487" calcext:value-type="float">
            <text:p>1170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3" calcext:value-type="float">
            <text:p>3</text:p>
          </table:table-cell>
          <table:table-cell table:formula="of:=[.H15]" office:value-type="float" office:value="11709.3318543487" calcext:value-type="float">
            <text:p>11709</text:p>
          </table:table-cell>
          <table:table-cell table:formula="of:=[.D16]*[.$E$8]" office:value-type="float" office:value="130.517791575548" calcext:value-type="float">
            <text:p>131</text:p>
          </table:table-cell>
          <table:table-cell table:formula="of:=[.G16]-[.E16]" office:value-type="float" office:value="472.594072130082" calcext:value-type="float">
            <text:p>472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6]-[.F16]" office:value-type="float" office:value="11236.7377822186" calcext:value-type="float">
            <text:p>11237</text:p>
          </table:table-cell>
          <table:table-cell/>
          <table:table-cell table:style-name="ce444"/>
          <table:table-cell table:style-name="ce480" table:formula="of:=SUM([.F26:.F37])" office:value-type="float" office:value="6739.15666045115" calcext:value-type="float">
            <text:p>6739.2</text:p>
          </table:table-cell>
          <table:table-cell table:style-name="ce228" office:value-type="string" calcext:value-type="string">
            <text:p>Capital 12 mese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[.C16]+1" office:value-type="float" office:value="4" calcext:value-type="float">
            <text:p>4</text:p>
          </table:table-cell>
          <table:table-cell table:formula="of:=[.H16]" office:value-type="float" office:value="11236.7377822186" calcext:value-type="float">
            <text:p>11237</text:p>
          </table:table-cell>
          <table:table-cell table:formula="of:=[.D17]*[.$E$8]" office:value-type="float" office:value="125.250032887575" calcext:value-type="float">
            <text:p>125</text:p>
          </table:table-cell>
          <table:table-cell table:formula="of:=[.G17]-[.E17]" office:value-type="float" office:value="477.861830818056" calcext:value-type="float">
            <text:p>477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7]-[.F17]" office:value-type="float" office:value="10758.8759514005" calcext:value-type="float">
            <text:p>1075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5" calcext:value-type="float">
            <text:p>5</text:p>
          </table:table-cell>
          <table:table-cell table:formula="of:=[.H17]" office:value-type="float" office:value="10758.8759514005" calcext:value-type="float">
            <text:p>10759</text:p>
          </table:table-cell>
          <table:table-cell table:formula="of:=[.D18]*[.$E$8]" office:value-type="float" office:value="119.923557251524" calcext:value-type="float">
            <text:p>120</text:p>
          </table:table-cell>
          <table:table-cell table:formula="of:=[.G18]-[.E18]" office:value-type="float" office:value="483.188306454107" calcext:value-type="float">
            <text:p>483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8]-[.F18]" office:value-type="float" office:value="10275.6876449464" calcext:value-type="float">
            <text:p>10276</text:p>
          </table:table-cell>
          <table:table-cell/>
          <table:table-cell table:style-name="ce467" table:formula="of:=SUM([.E14:.E25])" office:value-type="float" office:value="1337.55066380761" calcext:value-type="float">
            <text:p>1338</text:p>
          </table:table-cell>
          <table:table-cell table:style-name="ce228" office:value-type="string" calcext:value-type="string">
            <text:p>Interes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formula="of:=[.C18]+1" office:value-type="float" office:value="6" calcext:value-type="float">
            <text:p>6</text:p>
          </table:table-cell>
          <table:table-cell table:formula="of:=[.H18]" office:value-type="float" office:value="10275.6876449464" calcext:value-type="float">
            <text:p>10276</text:p>
          </table:table-cell>
          <table:table-cell table:formula="of:=[.D19]*[.$E$8]" office:value-type="float" office:value="114.537710180318" calcext:value-type="float">
            <text:p>115</text:p>
          </table:table-cell>
          <table:table-cell table:formula="of:=[.G19]-[.E19]" office:value-type="float" office:value="488.574153525313" calcext:value-type="float">
            <text:p>488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9]-[.F19]" office:value-type="float" office:value="9787.11349142109" calcext:value-type="float">
            <text:p>978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7" calcext:value-type="float">
            <text:p>7</text:p>
          </table:table-cell>
          <table:table-cell table:formula="of:=[.H19]" office:value-type="float" office:value="9787.11349142109" calcext:value-type="float">
            <text:p>9787</text:p>
          </table:table-cell>
          <table:table-cell table:formula="of:=[.D20]*[.$E$8]" office:value-type="float" office:value="109.091829891655" calcext:value-type="float">
            <text:p>109</text:p>
          </table:table-cell>
          <table:table-cell table:formula="of:=[.G20]-[.E20]" office:value-type="float" office:value="494.020033813976" calcext:value-type="float">
            <text:p>494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0]-[.F20]" office:value-type="float" office:value="9293.09345760712" calcext:value-type="float">
            <text:p>9293</text:p>
          </table:table-cell>
          <table:table-cell/>
          <table:table-cell table:style-name="ce467" table:formula="of:=SUM([.E26:.E37])" office:value-type="float" office:value="498.185704016423" calcext:value-type="float">
            <text:p>498</text:p>
          </table:table-cell>
          <table:table-cell table:style-name="ce228" office:value-type="string" calcext:value-type="string">
            <text:p>Interes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formula="of:=[.C20]+1" office:value-type="float" office:value="8" calcext:value-type="float">
            <text:p>8</text:p>
          </table:table-cell>
          <table:table-cell table:formula="of:=[.H20]" office:value-type="float" office:value="9293.09345760712" calcext:value-type="float">
            <text:p>9293</text:p>
          </table:table-cell>
          <table:table-cell table:formula="of:=[.D21]*[.$E$8]" office:value-type="float" office:value="103.58524722669" calcext:value-type="float">
            <text:p>104</text:p>
          </table:table-cell>
          <table:table-cell table:formula="of:=[.G21]-[.E21]" office:value-type="float" office:value="499.526616478941" calcext:value-type="float">
            <text:p>499.5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1]-[.F21]" office:value-type="float" office:value="8793.56684112818" calcext:value-type="float">
            <text:p>879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formula="of:=[.H21]" office:value-type="float" office:value="8793.56684112818" calcext:value-type="float">
            <text:p>8794</text:p>
          </table:table-cell>
          <table:table-cell table:formula="of:=[.D22]*[.$E$8]" office:value-type="float" office:value="98.0172855678164" calcext:value-type="float">
            <text:p>98</text:p>
          </table:table-cell>
          <table:table-cell table:formula="of:=[.G22]-[.E22]" office:value-type="float" office:value="505.094578137814" calcext:value-type="float">
            <text:p>505.1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2]-[.F22]" office:value-type="float" office:value="8288.47226299036" calcext:value-type="float">
            <text:p>82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formula="of:=[.H22]" office:value-type="float" office:value="8288.47226299036" calcext:value-type="float">
            <text:p>8288</text:p>
          </table:table-cell>
          <table:table-cell table:formula="of:=[.D23]*[.$E$8]" office:value-type="float" office:value="92.3872607555256" calcext:value-type="float">
            <text:p>92</text:p>
          </table:table-cell>
          <table:table-cell table:formula="of:=[.G23]-[.E23]" office:value-type="float" office:value="510.724602950105" calcext:value-type="float">
            <text:p>510.7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3]-[.F23]" office:value-type="float" office:value="7777.74766004026" calcext:value-type="float">
            <text:p>777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1" calcext:value-type="float">
            <text:p>11</text:p>
          </table:table-cell>
          <table:table-cell table:formula="of:=[.H23]" office:value-type="float" office:value="7777.74766004026" calcext:value-type="float">
            <text:p>7778</text:p>
          </table:table-cell>
          <table:table-cell table:formula="of:=[.D24]*[.$E$8]" office:value-type="float" office:value="86.6944810043401" calcext:value-type="float">
            <text:p>87</text:p>
          </table:table-cell>
          <table:table-cell table:formula="of:=[.G24]-[.E24]" office:value-type="float" office:value="516.417382701291" calcext:value-type="float">
            <text:p>516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4]-[.F24]" office:value-type="float" office:value="7261.33027733896" calcext:value-type="float">
            <text:p>726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2" calcext:value-type="float">
            <text:p>12</text:p>
          </table:table-cell>
          <table:table-cell table:formula="of:=[.H24]" office:value-type="float" office:value="7261.33027733896" calcext:value-type="float">
            <text:p>7261</text:p>
          </table:table-cell>
          <table:table-cell table:formula="of:=[.D25]*[.$E$8]" office:value-type="float" office:value="80.9382468178126" calcext:value-type="float">
            <text:p>81</text:p>
          </table:table-cell>
          <table:table-cell table:formula="of:=[.G25]-[.E25]" office:value-type="float" office:value="522.173616887818" calcext:value-type="float">
            <text:p>522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5]-[.F25]" office:value-type="float" office:value="6739.15666045115" calcext:value-type="float">
            <text:p>673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3" calcext:value-type="float">
            <text:p>13</text:p>
          </table:table-cell>
          <table:table-cell table:formula="of:=[.H25]" office:value-type="float" office:value="6739.15666045115" calcext:value-type="float">
            <text:p>6739</text:p>
          </table:table-cell>
          <table:table-cell table:formula="of:=[.D26]*[.$E$8]" office:value-type="float" office:value="75.1178509025748" calcext:value-type="float">
            <text:p>75</text:p>
          </table:table-cell>
          <table:table-cell table:formula="of:=[.G26]-[.E26]" office:value-type="float" office:value="527.994012803056" calcext:value-type="float">
            <text:p>528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6]-[.F26]" office:value-type="float" office:value="6211.16264764809" calcext:value-type="float">
            <text:p>62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4" calcext:value-type="float">
            <text:p>14</text:p>
          </table:table-cell>
          <table:table-cell table:formula="of:=[.H26]" office:value-type="float" office:value="6211.16264764809" calcext:value-type="float">
            <text:p>6211</text:p>
          </table:table-cell>
          <table:table-cell table:formula="of:=[.D27]*[.$E$8]" office:value-type="float" office:value="69.2325780814297" calcext:value-type="float">
            <text:p>69</text:p>
          </table:table-cell>
          <table:table-cell table:formula="of:=[.G27]-[.E27]" office:value-type="float" office:value="533.879285624201" calcext:value-type="float">
            <text:p>533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7]-[.F27]" office:value-type="float" office:value="5677.28336202389" calcext:value-type="float">
            <text:p>567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5" calcext:value-type="float">
            <text:p>15</text:p>
          </table:table-cell>
          <table:table-cell table:formula="of:=[.H27]" office:value-type="float" office:value="5677.28336202389" calcext:value-type="float">
            <text:p>5677</text:p>
          </table:table-cell>
          <table:table-cell table:formula="of:=[.D28]*[.$E$8]" office:value-type="float" office:value="63.2817052054745" calcext:value-type="float">
            <text:p>63</text:p>
          </table:table-cell>
          <table:table-cell table:formula="of:=[.G28]-[.E28]" office:value-type="float" office:value="539.830158500156" calcext:value-type="float">
            <text:p>539.8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8]-[.F28]" office:value-type="float" office:value="5137.45320352373" calcext:value-type="float">
            <text:p>513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6" calcext:value-type="float">
            <text:p>16</text:p>
          </table:table-cell>
          <table:table-cell table:formula="of:=[.H28]" office:value-type="float" office:value="5137.45320352373" calcext:value-type="float">
            <text:p>5137</text:p>
          </table:table-cell>
          <table:table-cell table:formula="of:=[.D29]*[.$E$8]" office:value-type="float" office:value="57.264501065244" calcext:value-type="float">
            <text:p>57</text:p>
          </table:table-cell>
          <table:table-cell table:formula="of:=[.G29]-[.E29]" office:value-type="float" office:value="545.847362640387" calcext:value-type="float">
            <text:p>545.8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9]-[.F29]" office:value-type="float" office:value="4591.60584088335" calcext:value-type="float">
            <text:p>459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7" calcext:value-type="float">
            <text:p>17</text:p>
          </table:table-cell>
          <table:table-cell table:formula="of:=[.H29]" office:value-type="float" office:value="4591.60584088335" calcext:value-type="float">
            <text:p>4592</text:p>
          </table:table-cell>
          <table:table-cell table:formula="of:=[.D30]*[.$E$8]" office:value-type="float" office:value="51.1802263008644" calcext:value-type="float">
            <text:p>51</text:p>
          </table:table-cell>
          <table:table-cell table:formula="of:=[.G30]-[.E30]" office:value-type="float" office:value="551.931637404767" calcext:value-type="float">
            <text:p>551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0]-[.F30]" office:value-type="float" office:value="4039.67420347858" calcext:value-type="float">
            <text:p>404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8" calcext:value-type="float">
            <text:p>18</text:p>
          </table:table-cell>
          <table:table-cell table:formula="of:=[.H30]" office:value-type="float" office:value="4039.67420347858" calcext:value-type="float">
            <text:p>4040</text:p>
          </table:table-cell>
          <table:table-cell table:formula="of:=[.D31]*[.$E$8]" office:value-type="float" office:value="45.0281333112039" calcext:value-type="float">
            <text:p>45</text:p>
          </table:table-cell>
          <table:table-cell table:formula="of:=[.G31]-[.E31]" office:value-type="float" office:value="558.083730394427" calcext:value-type="float">
            <text:p>558.1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1]-[.F31]" office:value-type="float" office:value="3481.59047308415" calcext:value-type="float">
            <text:p>348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19" calcext:value-type="float">
            <text:p>19</text:p>
          </table:table-cell>
          <table:table-cell table:formula="of:=[.H31]" office:value-type="float" office:value="3481.59047308415" calcext:value-type="float">
            <text:p>3482</text:p>
          </table:table-cell>
          <table:table-cell table:formula="of:=[.D32]*[.$E$8]" office:value-type="float" office:value="38.8074661620127" calcext:value-type="float">
            <text:p>39</text:p>
          </table:table-cell>
          <table:table-cell table:formula="of:=[.G32]-[.E32]" office:value-type="float" office:value="564.304397543618" calcext:value-type="float">
            <text:p>564.3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2]-[.F32]" office:value-type="float" office:value="2917.28607554053" calcext:value-type="float">
            <text:p>291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0" calcext:value-type="float">
            <text:p>20</text:p>
          </table:table-cell>
          <table:table-cell table:formula="of:=[.H32]" office:value-type="float" office:value="2917.28607554053" calcext:value-type="float">
            <text:p>2917</text:p>
          </table:table-cell>
          <table:table-cell table:formula="of:=[.D33]*[.$E$8]" office:value-type="float" office:value="32.5174604930376" calcext:value-type="float">
            <text:p>33</text:p>
          </table:table-cell>
          <table:table-cell table:formula="of:=[.G33]-[.E33]" office:value-type="float" office:value="570.594403212593" calcext:value-type="float">
            <text:p>570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3]-[.F33]" office:value-type="float" office:value="2346.69167232794" calcext:value-type="float">
            <text:p>234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1" calcext:value-type="float">
            <text:p>21</text:p>
          </table:table-cell>
          <table:table-cell table:formula="of:=[.H33]" office:value-type="float" office:value="2346.69167232794" calcext:value-type="float">
            <text:p>2347</text:p>
          </table:table-cell>
          <table:table-cell table:formula="of:=[.D34]*[.$E$8]" office:value-type="float" office:value="26.1573434241019" calcext:value-type="float">
            <text:p>26</text:p>
          </table:table-cell>
          <table:table-cell table:formula="of:=[.G34]-[.E34]" office:value-type="float" office:value="576.954520281529" calcext:value-type="float">
            <text:p>577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4]-[.F34]" office:value-type="float" office:value="1769.73715204641" calcext:value-type="float">
            <text:p>17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2" calcext:value-type="float">
            <text:p>22</text:p>
          </table:table-cell>
          <table:table-cell table:formula="of:=[.H34]" office:value-type="float" office:value="1769.73715204641" calcext:value-type="float">
            <text:p>1770</text:p>
          </table:table-cell>
          <table:table-cell table:formula="of:=[.D35]*[.$E$8]" office:value-type="float" office:value="19.7263334601381" calcext:value-type="float">
            <text:p>20</text:p>
          </table:table-cell>
          <table:table-cell table:formula="of:=[.G35]-[.E35]" office:value-type="float" office:value="583.385530245493" calcext:value-type="float">
            <text:p>583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5]-[.F35]" office:value-type="float" office:value="1186.35162180092" calcext:value-type="float">
            <text:p>118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3" calcext:value-type="float">
            <text:p>23</text:p>
          </table:table-cell>
          <table:table-cell table:formula="of:=[.H35]" office:value-type="float" office:value="1186.35162180092" calcext:value-type="float">
            <text:p>1186</text:p>
          </table:table-cell>
          <table:table-cell table:formula="of:=[.D36]*[.$E$8]" office:value-type="float" office:value="13.2236403951624" calcext:value-type="float">
            <text:p>13</text:p>
          </table:table-cell>
          <table:table-cell table:formula="of:=[.G36]-[.E36]" office:value-type="float" office:value="589.888223310468" calcext:value-type="float">
            <text:p>589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6]-[.F36]" office:value-type="float" office:value="596.463398490451" calcext:value-type="float">
            <text:p>5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4" calcext:value-type="float">
            <text:p>24</text:p>
          </table:table-cell>
          <table:table-cell table:formula="of:=[.H36]" office:value-type="float" office:value="596.463398490451" calcext:value-type="float">
            <text:p>596</text:p>
          </table:table-cell>
          <table:table-cell table:formula="of:=[.D37]*[.$E$8]" office:value-type="float" office:value="6.64846521517862" calcext:value-type="float">
            <text:p>7</text:p>
          </table:table-cell>
          <table:table-cell table:formula="of:=[.G37]-[.E37]" office:value-type="float" office:value="596.463398490452" calcext:value-type="float">
            <text:p>596.5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64" office:value-type="string" calcext:value-type="string">
            <text:p>Total año 2</text:p>
          </table:table-cell>
          <table:table-cell table:style-name="ce468"/>
          <table:table-cell table:style-name="ce473" table:formula="of:=SUM([.E26:.E37])" office:value-type="float" office:value="498.185704016423" calcext:value-type="float">
            <text:p>498</text:p>
          </table:table-cell>
          <table:table-cell table:style-name="ce476" table:formula="of:=SUM([.F26:.F37])" office:value-type="float" office:value="6739.15666045115" calcext:value-type="float">
            <text:p>6739.2</text:p>
          </table:table-cell>
          <table:table-cell table:style-name="ce473" table:formula="of:=SUM([.G26:.G37])" office:value-type="float" office:value="7237.34236446757" calcext:value-type="float">
            <text:p>7237</text:p>
          </table:table-cell>
          <table:table-cell table:style-name="ce468"/>
          <table:table-cell table:number-columns-repeated="16376"/>
        </table:table-row>
      </table:table>
      <table:table table:name="COK=Ku" table:style-name="ta16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481" office:value-type="string" calcext:value-type="string" table:number-columns-spanned="5" table:number-rows-spanned="1">
            <text:p>COK DES APALANCADO CON RIESGO TOTAL</text:p>
          </table:table-cell>
          <table:covered-table-cell table:number-columns-repeated="3" table:style-name="ce485"/>
          <table:covered-table-cell table:style-name="ce489"/>
          <table:table-cell/>
          <table:table-cell table:style-name="ce481" office:value-type="string" calcext:value-type="string" table:number-columns-spanned="5" table:number-rows-spanned="1">
            <text:p>COK DES APALANCADO CON RIESGO SISTEMATICO</text:p>
          </table:table-cell>
          <table:covered-table-cell table:number-columns-repeated="3" table:style-name="ce485"/>
          <table:covered-table-cell table:style-name="ce48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6">
          <table:table-cell/>
          <table:table-cell table:style-name="ce482" office:value-type="string" calcext:value-type="string">
            <text:p>Kurt = Rf usa+ <text:span text:style-name="T3">b</text:span><text:span text:style-name="T4">u total </text:span><text:span text:style-name="T5">ME</text:span><text:span text:style-name="T6">* (Rm- Rf)</text:span><text:span text:style-name="T5"> </text:span><text:span text:style-name="T6">usa+ Rp </text:span><text:span text:style-name="T5">PERU</text:span><text:span text:style-name="T6"> </text:span></text:p>
          </table:table-cell>
          <table:table-cell table:number-columns-repeated="5"/>
          <table:table-cell table:style-name="ce482" office:value-type="string" calcext:value-type="string">
            <text:p>Kurs = Rf usa+ <text:span text:style-name="T3">b</text:span><text:span text:style-name="T4">u</text:span><text:span text:style-name="T5">ME</text:span><text:span text:style-name="T6">* (Rm- Rf)</text:span><text:span text:style-name="T5"> </text:span><text:span text:style-name="T6">usa+ </text:span><text:span text:style-name="T7">λ</text:span><text:span text:style-name="T8">Rp </text:span><text:span text:style-name="T5">PERU</text:span><text:span text:style-name="T6"> </text:span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62" office:value-type="string" calcext:value-type="string">
            <text:p>Donde</text:p>
          </table:table-cell>
          <table:table-cell table:number-columns-repeated="5"/>
          <table:table-cell table:style-name="ce362" office:value-type="string" calcext:value-type="string">
            <text:p>Donde</text:p>
          </table:table-cell>
          <table:table-cell table:number-columns-repeated="16376"/>
        </table:table-row>
        <table:table-row table:style-name="ro1">
          <table:table-cell/>
          <table:table-cell table:style-name="ce228" office:value-type="string" calcext:value-type="string">
            <text:p>Rf usa =</text:p>
          </table:table-cell>
          <table:table-cell table:style-name="ce486" office:value-type="percentage" office:value="0.0495" calcext:value-type="percentage">
            <text:p>4.95 %</text:p>
          </table:table-cell>
          <table:table-cell table:style-name="ce228" office:value-type="string" calcext:value-type="string">
            <text:p>promedio geométrico 1928-2020</text:p>
          </table:table-cell>
          <table:table-cell table:number-columns-repeated="3"/>
          <table:table-cell table:style-name="ce228" office:value-type="string" calcext:value-type="string">
            <text:p>Rf usa =</text:p>
          </table:table-cell>
          <table:table-cell table:style-name="ce486" office:value-type="percentage" office:value="0.0495" calcext:value-type="percentage">
            <text:p>4.95 %</text:p>
          </table:table-cell>
          <table:table-cell table:style-name="ce228" office:value-type="string" calcext:value-type="string">
            <text:p>promedio geométrico 1928-2020</text:p>
          </table:table-cell>
          <table:table-cell table:number-columns-repeated="16374"/>
        </table:table-row>
        <table:table-row table:style-name="ro1">
          <table:table-cell/>
          <table:table-cell table:style-name="ce483" office:value-type="string" calcext:value-type="string">
            <text:p>βu total ME =</text:p>
          </table:table-cell>
          <table:table-cell office:value-type="float" office:value="3.5" calcext:value-type="float">
            <text:p>3.5</text:p>
          </table:table-cell>
          <table:table-cell table:style-name="ce228" office:value-type="string" calcext:value-type="string">
            <text:p>Beta total desapalancado para vestir</text:p>
          </table:table-cell>
          <table:table-cell table:number-columns-repeated="3"/>
          <table:table-cell table:style-name="ce483" office:value-type="string" calcext:value-type="string">
            <text:p>βu ME =</text:p>
          </table:table-cell>
          <table:table-cell office:value-type="float" office:value="0.74" calcext:value-type="float">
            <text:p>0.74</text:p>
          </table:table-cell>
          <table:table-cell table:style-name="ce228" office:value-type="string" calcext:value-type="string">
            <text:p>Beta des apalancado promedio para vestir ME (2018-2020)</text:p>
          </table:table-cell>
          <table:table-cell table:number-columns-repeated="16374"/>
        </table:table-row>
        <table:table-row table:style-name="ro1">
          <table:table-cell/>
          <table:table-cell table:style-name="ce228" office:value-type="string" calcext:value-type="string">
            <text:p>(Rm-Rf) =</text:p>
          </table:table-cell>
          <table:table-cell table:style-name="ce486" office:value-type="percentage" office:value="0.0464" calcext:value-type="percentage">
            <text:p>4.64 %</text:p>
          </table:table-cell>
          <table:table-cell table:style-name="ce228" office:value-type="string" calcext:value-type="string">
            <text:p>promedio geométrico 1928-2020</text:p>
          </table:table-cell>
          <table:table-cell table:number-columns-repeated="3"/>
          <table:table-cell table:style-name="ce228" office:value-type="string" calcext:value-type="string">
            <text:p>(Rm-Rf) =</text:p>
          </table:table-cell>
          <table:table-cell table:style-name="ce486" office:value-type="percentage" office:value="0.0464" calcext:value-type="percentage">
            <text:p>4.64 %</text:p>
          </table:table-cell>
          <table:table-cell table:style-name="ce228" office:value-type="string" calcext:value-type="string">
            <text:p>promedio geométrico 1928-2020</text:p>
          </table:table-cell>
          <table:table-cell table:number-columns-repeated="16374"/>
        </table:table-row>
        <table:table-row table:style-name="ro1">
          <table:table-cell/>
          <table:table-cell table:style-name="ce228" office:value-type="string" calcext:value-type="string">
            <text:p>Rp =</text:p>
          </table:table-cell>
          <table:table-cell table:style-name="ce487" office:value-type="percentage" office:value="0.0174" calcext:value-type="percentage">
            <text:p>1.74 %</text:p>
          </table:table-cell>
          <table:table-cell table:style-name="ce228" office:value-type="string" calcext:value-type="string">
            <text:p>Promedio 2020</text:p>
          </table:table-cell>
          <table:table-cell table:number-columns-repeated="3"/>
          <table:table-cell table:style-name="ce228" office:value-type="string" calcext:value-type="string">
            <text:p>Rp =</text:p>
          </table:table-cell>
          <table:table-cell table:style-name="ce487" office:value-type="percentage" office:value="0.0174" calcext:value-type="percentage">
            <text:p>1.74 %</text:p>
          </table:table-cell>
          <table:table-cell table:style-name="ce228" office:value-type="string" calcext:value-type="string">
            <text:p>Promedio 2020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λ =</text:p>
          </table:table-cell>
          <table:table-cell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/>
          <table:table-cell table:style-name="ce484" office:value-type="string" calcext:value-type="string">
            <text:p>Kurt =</text:p>
          </table:table-cell>
          <table:table-cell table:style-name="ce488" table:formula="of:=[.C7]+[.C8]*[.C9]+[.C10]" office:value-type="percentage" office:value="0.2293" calcext:value-type="percentage">
            <text:p>22.93 %</text:p>
          </table:table-cell>
          <table:table-cell table:style-name="ce228" office:value-type="string" calcext:value-type="string">
            <text:p>COK desapalancado con Riesgo Total</text:p>
          </table:table-cell>
          <table:table-cell table:number-columns-repeated="3"/>
          <table:table-cell table:style-name="ce484" office:value-type="string" calcext:value-type="string">
            <text:p>Kurs =</text:p>
          </table:table-cell>
          <table:table-cell table:style-name="ce488" table:formula="of:=[.I7]+[.I8]*[.I9]+[.I11]*[.I10]" office:value-type="percentage" office:value="0.109936" calcext:value-type="percentage">
            <text:p>10.99 %</text:p>
          </table:table-cell>
          <table:table-cell table:style-name="ce228" office:value-type="string" calcext:value-type="string">
            <text:p>COK desapalancado con Riesgo Total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28" office:value-type="string" calcext:value-type="string">
            <text:p>nominal</text:p>
          </table:table-cell>
          <table:table-cell table:number-columns-repeated="16380"/>
        </table:table-row>
      </table:table>
      <table:table table:name="Kert y Wacc" table:style-name="ta17">
        <table:table-column table:style-name="co1" table:default-cell-style-name="Default"/>
        <table:table-column table:style-name="co20" table:default-cell-style-name="ce482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5" table:default-cell-style-name="Default"/>
        <table:table-column table:style-name="co20" table:default-cell-style-name="Default"/>
        <table:table-column table:style-name="co1" table:number-columns-repeated="254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490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496"/>
          <table:covered-table-cell table:style-name="ce503"/>
          <table:table-cell/>
          <table:table-cell table:style-name="ce506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508"/>
          <table:covered-table-cell table:style-name="ce509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491" office:value-type="string" calcext:value-type="string">
            <text:p>Kert = Rfusa + <text:span text:style-name="T9">b</text:span><text:span text:style-name="T10">rl total </text:span><text:span text:style-name="T11">PERU</text:span><text:span text:style-name="T12">* (Rm- Rf )usa+ Rp </text:span><text:span text:style-name="T11">PERU </text:span><text:span text:style-name="T12">                                                </text:span></text:p>
          </table:table-cell>
          <table:table-cell table:number-columns-repeated="4"/>
          <table:table-cell table:style-name="ce507" office:value-type="string" calcext:value-type="string">
            <text:p>Kwacc rt= E/V * Kert + D/V * K<text:span text:style-name="T29">d </text:span><text:span text:style-name="T30">* (1 – t)</text:span><text:span text:style-name="T31">                                                            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482" office:value-type="string" calcext:value-type="string">
            <text:p>Dónde: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fusa =</text:p>
          </table:table-cell>
          <table:table-cell table:style-name="ce497" office:value-type="percentage" office:value="0.0495" calcext:value-type="percentage">
            <text:p>4.95 %</text:p>
          </table:table-cell>
          <table:table-cell table:number-columns-repeated="3"/>
          <table:table-cell table:style-name="ce507" office:value-type="string" calcext:value-type="string">
            <text:p>E/V*<text:span text:style-name="T32"> </text:span><text:span text:style-name="T33">=</text:span></text:p>
          </table:table-cell>
          <table:table-cell table:style-name="ce366" table:formula="of:=[$'Inversión inicial'.H64]/[$'Inversión inicial'.F64]" office:value-type="float" office:value="0.457462308794511" calcext:value-type="float">
            <text:p>0.46</text:p>
          </table:table-cell>
          <table:table-cell table:style-name="ce228" office:value-type="string" calcext:value-type="string">
            <text:p>capital</text:p>
          </table:table-cell>
          <table:table-cell table:number-columns-repeated="16375"/>
        </table:table-row>
        <table:table-row table:style-name="ro1">
          <table:table-cell/>
          <table:table-cell table:style-name="ce492" office:value-type="string" calcext:value-type="string">
            <text:p>b<text:span text:style-name="T13">rl total</text:span><text:span text:style-name="T14"> PERU</text:span><text:span text:style-name="T15">= </text:span></text:p>
          </table:table-cell>
          <table:table-cell table:style-name="ce498" table:formula="of:=[.C22]" office:value-type="float" office:value="3.66097339453032" calcext:value-type="float">
            <text:p><text:s/>3.66 </text:p>
          </table:table-cell>
          <table:table-cell table:number-columns-repeated="3"/>
          <table:table-cell table:style-name="ce507" office:value-type="string" calcext:value-type="string">
            <text:p>Kert =</text:p>
          </table:table-cell>
          <table:table-cell table:style-name="ce499" table:formula="of:=[.C12]" office:value-type="percentage" office:value="0.236769165506207" calcext:value-type="percentage">
            <text:p>23.68 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Rm – Rf)usa =</text:p>
          </table:table-cell>
          <table:table-cell table:style-name="ce497" office:value-type="percentage" office:value="0.0464" calcext:value-type="percentage">
            <text:p>4.64 %</text:p>
          </table:table-cell>
          <table:table-cell table:number-columns-repeated="3"/>
          <table:table-cell table:style-name="ce507" office:value-type="string" calcext:value-type="string">
            <text:p>D/V*<text:span text:style-name="T32"> </text:span><text:span text:style-name="T33">= </text:span></text:p>
          </table:table-cell>
          <table:table-cell table:style-name="ce366" table:formula="of:=1-[.H7]" office:value-type="float" office:value="0.542537691205489" calcext:value-type="float">
            <text:p>0.54</text:p>
          </table:table-cell>
          <table:table-cell table:style-name="ce228" office:value-type="string" calcext:value-type="string">
            <text:p>deuda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p = </text:p>
          </table:table-cell>
          <table:table-cell table:style-name="ce499" table:formula="of:=+[$'COK=Ku'.C10]" office:value-type="percentage" office:value="0.0174" calcext:value-type="percentage">
            <text:p>1.74 %</text:p>
          </table:table-cell>
          <table:table-cell table:number-columns-repeated="3"/>
          <table:table-cell table:style-name="ce507" office:value-type="string" calcext:value-type="string">
            <text:p>K<text:span text:style-name="T29">d </text:span><text:span text:style-name="T30">=</text:span><text:span text:style-name="T31"> </text:span></text:p>
          </table:table-cell>
          <table:table-cell table:style-name="ce499" table:formula="of:=+[$Costo_Deuda.E4]" office:value-type="percentage" office:value="0.174" calcext:value-type="percentage">
            <text:p>17.40 %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99"/>
          <table:table-cell table:number-columns-repeated="3"/>
          <table:table-cell table:style-name="ce507" office:value-type="string" calcext:value-type="string">
            <text:p>t* <text:span text:style-name="T13">= </text:span></text:p>
          </table:table-cell>
          <table:table-cell table:style-name="ce502" table:formula="of:=[.C20]" office:value-type="float" office:value="0.2933" calcext:value-type="float">
            <text:p>0.2933</text:p>
          </table:table-cell>
          <table:table-cell table:number-columns-repeated="16376"/>
        </table:table-row>
        <table:table-row table:style-name="ro1">
          <table:table-cell/>
          <table:table-cell table:style-name="ce493" office:value-type="string" calcext:value-type="string">
            <text:p>Kert =</text:p>
          </table:table-cell>
          <table:table-cell table:style-name="ce500" table:formula="of:=[.C7]+[.C8]*([.C9])+[.C10]" office:value-type="percentage" office:value="0.236769165506207" calcext:value-type="percentage">
            <text:p>23.68 %</text:p>
          </table:table-cell>
          <table:table-cell office:value-type="string" calcext:value-type="string">
            <text:p>nominal</text:p>
          </table:table-cell>
          <table:table-cell table:style-name="ce504"/>
          <table:table-cell/>
          <table:table-cell table:style-name="ce507"/>
          <table:table-cell table:number-columns-repeated="16377"/>
        </table:table-row>
        <table:table-row table:style-name="ro1">
          <table:table-cell table:number-columns-repeated="2"/>
          <table:table-cell table:style-name="ce499"/>
          <table:table-cell table:number-columns-repeated="3"/>
          <table:table-cell table:style-name="ce493" office:value-type="string" calcext:value-type="string">
            <text:p>Kwacc</text:p>
          </table:table-cell>
          <table:table-cell table:style-name="ce488" table:formula="of:=[.H7]*[.H8]+[.H9]*[.H10]*(1-[.H11])" office:value-type="percentage" office:value="0.175026550333055" calcext:value-type="percentage">
            <text:p>17.50 %</text:p>
          </table:table-cell>
          <table:table-cell office:value-type="string" calcext:value-type="string">
            <text:p>nominal</text:p>
          </table:table-cell>
          <table:table-cell table:number-columns-repeated="16375"/>
        </table:table-row>
        <table:table-row table:style-name="ro1">
          <table:table-cell/>
          <table:table-cell table:style-name="ce494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501"/>
          <table:covered-table-cell table:style-name="ce505"/>
          <table:table-cell/>
          <table:table-cell table:style-name="ce495"/>
          <table:table-cell table:number-columns-repeated="16377"/>
        </table:table-row>
        <table:table-row table:style-name="ro1">
          <table:table-cell/>
          <table:table-cell table:style-name="ce495" office:value-type="string" calcext:value-type="string">
            <text:p>             b<text:span text:style-name="T16">rl total  </text:span><text:span text:style-name="T17">=  </text:span><text:span text:style-name="T18">b</text:span><text:span text:style-name="T19">u total ME *</text:span><text:span text:style-name="T20">( 1+(D/E*)*( 1-t))</text:span><text:span text:style-name="T21">PERU                                                                             </text:span><text:span text:style-name="T22"> 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nde:<text:span text:style-name="T23">         </text:span><text:span text:style-name="T24">                                                                      </text:span></text:p>
          </table:table-cell>
          <table:table-cell table:number-columns-repeated="16382"/>
        </table:table-row>
        <table:table-row table:style-name="ro1">
          <table:table-cell/>
          <table:table-cell table:style-name="ce492"/>
          <table:table-cell table:number-columns-repeated="16382"/>
        </table:table-row>
        <table:table-row table:style-name="ro1">
          <table:table-cell/>
          <table:table-cell table:style-name="ce492" office:value-type="string" calcext:value-type="string">
            <text:p>b<text:span text:style-name="T25">u total ME </text:span><text:span text:style-name="T26">= </text:span></text:p>
          </table:table-cell>
          <table:table-cell table:formula="of:=+[$'COK=Ku'.C8]" office:value-type="float" office:value="3.5" calcext:value-type="float">
            <text:p>3.5</text:p>
          </table:table-cell>
          <table:table-cell/>
          <table:table-cell table:style-name="ce22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/E*<text:span text:style-name="T27">PERU </text:span><text:span text:style-name="T28">= </text:span></text:p>
          </table:table-cell>
          <table:table-cell table:style-name="ce366" table:formula="of:=[$'Inversión inicial'.H65]/[$'Inversión inicial'.G65]" office:value-type="float" office:value="0.843189913272303" calcext:value-type="float">
            <text:p>0.8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* = </text:p>
          </table:table-cell>
          <table:table-cell table:style-name="ce502" office:value-type="float" office:value="0.2933" calcext:value-type="float">
            <text:p>0.2933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99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βrl total perú </text:p>
          </table:table-cell>
          <table:table-cell table:style-name="ce498" table:formula="of:=[.C18]*(1+ [.C20]*(1-[.C19]))" office:value-type="float" office:value="3.66097339453032" calcext:value-type="float">
            <text:p><text:s/>3.66 </text:p>
          </table:table-cell>
          <table:table-cell table:number-columns-repeated="16381"/>
        </table:table-row>
      </table:table>
      <table:table table:name="FLUJO DE CAJA" table:style-name="ta18">
        <table:table-column table:style-name="co1" table:default-cell-style-name="Default"/>
        <table:table-column table:style-name="co57" table:default-cell-style-name="ce511"/>
        <table:table-column table:style-name="co27" table:default-cell-style-name="ce516"/>
        <table:table-column table:style-name="co32" table:default-cell-style-name="ce516"/>
        <table:table-column table:style-name="co48" table:default-cell-style-name="ce516"/>
        <table:table-column table:style-name="co58" table:default-cell-style-name="ce516"/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89" office:value-type="string" calcext:value-type="string" table:number-columns-spanned="5" table:number-rows-spanned="1">
            <text:p>FLUJO DE CAJA ECONOMICO Y FINANCIERO</text:p>
          </table:table-cell>
          <table:covered-table-cell table:number-columns-repeated="4" table:style-name="ce98"/>
          <table:table-cell table:number-columns-repeated="16378"/>
        </table:table-row>
        <table:table-row table:style-name="ro1">
          <table:table-cell/>
          <table:table-cell table:style-name="ce90" table:number-columns-repeated="5"/>
          <table:table-cell table:number-columns-repeated="16378"/>
        </table:table-row>
        <table:table-row table:style-name="ro1">
          <table:table-cell/>
          <table:table-cell table:style-name="ce510" office:value-type="string" calcext:value-type="string">
            <text:p>RUBRO</text:p>
          </table:table-cell>
          <table:table-cell table:style-name="ce510" office:value-type="string" calcext:value-type="string">
            <text:p>Año 0</text:p>
          </table:table-cell>
          <table:table-cell table:style-name="ce510" office:value-type="string" calcext:value-type="string">
            <text:p>Año 1</text:p>
          </table:table-cell>
          <table:table-cell table:style-name="ce510" office:value-type="string" calcext:value-type="string">
            <text:p>Año 2</text:p>
          </table:table-cell>
          <table:table-cell table:style-name="ce510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ctivo fijo tangible</text:p>
          </table:table-cell>
          <table:table-cell table:formula="of:=-[$'Inversión inicial'.F8]" office:value-type="float" office:value="-11504.0277777778" calcext:value-type="float">
            <text:p>-11,504 <text:s text:c="2"/></text:p>
          </table:table-cell>
          <table:table-cell/>
          <table:table-cell table:formula="of:=-[$Depreciación.C6]" office:value-type="float" office:value="-1270.69444444444" calcext:value-type="float">
            <text:p>-1,271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ctivo fijo intangible</text:p>
          </table:table-cell>
          <table:table-cell table:formula="of:=-[$'Inversión inicial'.F35]" office:value-type="float" office:value="-643.055555555556" calcext:value-type="float">
            <text:p>-643 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formula="of:=-[$Capital_Trabajo.C75]" office:value-type="float" office:value="-15481.3094722222" calcext:value-type="float">
            <text:p>-15,481 <text:s text:c="2"/></text:p>
          </table:table-cell>
          <table:table-cell table:formula="of:=-[$Capital_Trabajo.D75]" office:value-type="float" office:value="-377.65735277778" calcext:value-type="float">
            <text:p>-378 <text:s text:c="2"/></text:p>
          </table:table-cell>
          <table:table-cell table:formula="of:=-[$Capital_Trabajo.E75]" office:value-type="float" office:value="-561.389097777774" calcext:value-type="float">
            <text:p>-561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cupero de capital de trabajo</text:p>
          </table:table-cell>
          <table:table-cell table:number-columns-repeated="3"/>
          <table:table-cell table:formula="of:=-SUM([.C7:.E7])" office:value-type="float" office:value="16420.3559227778" calcext:value-type="float">
            <text:p>16,420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cupero de activo fijo tangible</text:p>
          </table:table-cell>
          <table:table-cell table:number-columns-repeated="3"/>
          <table:table-cell table:formula="of:=[$Depreciación.H9]" office:value-type="float" office:value="2906.45833333333" calcext:value-type="float">
            <text:p>2,906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512" office:value-type="string" calcext:value-type="string">
            <text:p>Flujo de Inversión y Liquidación</text:p>
          </table:table-cell>
          <table:table-cell table:style-name="ce517" table:formula="of:=SUM([.C5:.C9])" office:value-type="float" office:value="-27628.3928055556" calcext:value-type="float">
            <text:p>-27,628 <text:s text:c="2"/></text:p>
          </table:table-cell>
          <table:table-cell table:style-name="ce517" table:formula="of:=SUM([.D5:.D9])" office:value-type="float" office:value="-377.65735277778" calcext:value-type="float">
            <text:p>-378 <text:s text:c="2"/></text:p>
          </table:table-cell>
          <table:table-cell table:style-name="ce517" table:formula="of:=SUM([.E5:.E9])" office:value-type="float" office:value="-1832.08354222222" calcext:value-type="float">
            <text:p>-1,832 <text:s text:c="2"/></text:p>
          </table:table-cell>
          <table:table-cell table:style-name="ce517" table:formula="of:=SUM([.F5:.F9])" office:value-type="float" office:value="19326.8142561111" calcext:value-type="float">
            <text:p>19,327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gresos por ventas</text:p>
          </table:table-cell>
          <table:table-cell/>
          <table:table-cell table:style-name="ce517" table:formula="of:=+[$'Estado de resultados'.C7]" office:value-type="float" office:value="211916.288622223" calcext:value-type="float">
            <text:p>211,916 <text:s text:c="2"/></text:p>
          </table:table-cell>
          <table:table-cell table:style-name="ce517" table:formula="of:=+[$'Estado de resultados'.D7]" office:value-type="float" office:value="219186.608642963" calcext:value-type="float">
            <text:p>219,187 <text:s text:c="2"/></text:p>
          </table:table-cell>
          <table:table-cell table:style-name="ce517" table:formula="of:=+[$'Estado de resultados'.E7]" office:value-type="float" office:value="230203.142436149" calcext:value-type="float">
            <text:p>230,203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s de produccion (*)</text:p>
          </table:table-cell>
          <table:table-cell/>
          <table:table-cell table:formula="of:=+[$'Estado de resultados'.C9]" office:value-type="float" office:value="-130785.713666667" calcext:value-type="float">
            <text:p>-130,786 <text:s text:c="2"/></text:p>
          </table:table-cell>
          <table:table-cell table:formula="of:=+[$'Estado de resultados'.D9]" office:value-type="float" office:value="-135317.6019" calcext:value-type="float">
            <text:p>-135,318 <text:s text:c="2"/></text:p>
          </table:table-cell>
          <table:table-cell table:formula="of:=+[$'Estado de resultados'.E9]" office:value-type="float" office:value="-142054.271073333" calcext:value-type="float">
            <text:p>-142,054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stos operativos (*)</text:p>
          </table:table-cell>
          <table:table-cell/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puestos (**)</text:p>
          </table:table-cell>
          <table:table-cell/>
          <table:table-cell table:formula="of:=+[$'Estado de resultados'.C19]" office:value-type="float" office:value="-3147.1201905927" calcext:value-type="float">
            <text:p>-3,147 <text:s text:c="2"/></text:p>
          </table:table-cell>
          <table:table-cell table:formula="of:=+[$'Estado de resultados'.D19]" office:value-type="float" office:value="-3954.95756787789" calcext:value-type="float">
            <text:p>-3,955 <text:s text:c="2"/></text:p>
          </table:table-cell>
          <table:table-cell table:formula="of:=+[$'Estado de resultados'.E19]" office:value-type="float" office:value="-5217.5176307342" calcext:value-type="float">
            <text:p>-5,218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512" office:value-type="string" calcext:value-type="string">
            <text:p>Flujo Operativo</text:p>
          </table:table-cell>
          <table:table-cell table:style-name="ce517"/>
          <table:table-cell table:style-name="ce517" table:formula="of:=SUM([.D11:.D14])" office:value-type="float" office:value="22929.1492094077" calcext:value-type="float">
            <text:p>22,929 <text:s text:c="2"/></text:p>
          </table:table-cell>
          <table:table-cell table:style-name="ce517" table:formula="of:=SUM([.E11:.E14])" office:value-type="float" office:value="24859.7436195299" calcext:value-type="float">
            <text:p>24,860 <text:s text:c="2"/></text:p>
          </table:table-cell>
          <table:table-cell table:style-name="ce517" table:formula="of:=SUM([.F11:.F14])" office:value-type="float" office:value="27877.0481765255" calcext:value-type="float">
            <text:p>27,877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513" office:value-type="string" calcext:value-type="string">
            <text:p>Flujo de Caja Economico, FCE</text:p>
          </table:table-cell>
          <table:table-cell table:style-name="ce518" table:formula="of:=[.C10]+[.C15]" office:value-type="float" office:value="-27628.3928055556" calcext:value-type="float">
            <text:p>-27,628 <text:s text:c="2"/></text:p>
          </table:table-cell>
          <table:table-cell table:style-name="ce518" table:formula="of:=[.D10]+[.D15]" office:value-type="float" office:value="22551.4918566299" calcext:value-type="float">
            <text:p>22,551 <text:s text:c="2"/></text:p>
          </table:table-cell>
          <table:table-cell table:style-name="ce518" table:formula="of:=[.E10]+[.E15]" office:value-type="float" office:value="23027.6600773077" calcext:value-type="float">
            <text:p>23,028 <text:s text:c="2"/></text:p>
          </table:table-cell>
          <table:table-cell table:style-name="ce518" table:formula="of:=[.F10]+[.F15]" office:value-type="float" office:value="47203.8624326366" calcext:value-type="float">
            <text:p>47,204 <text:s text:c="2"/></text:p>
          </table:table-cell>
          <table:table-cell table:style-name="ce52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) Régimen laboral pequeña empresa</text:p>
          </table:table-cell>
          <table:table-cell table:style-name="ce517" table:number-columns-repeated="4"/>
          <table:table-cell table:style-name="ce52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*) Régimen MYPE Tributario</text:p>
          </table:table-cell>
          <table:table-cell table:style-name="ce517" table:number-columns-repeated="4"/>
          <table:table-cell table:style-name="ce523"/>
          <table:table-cell table:number-columns-repeated="16377"/>
        </table:table-row>
        <table:table-row table:style-name="ro1">
          <table:table-cell/>
          <table:table-cell table:style-name="ce512"/>
          <table:table-cell table:style-name="ce517" table:number-columns-repeated="4"/>
          <table:table-cell table:style-name="ce523"/>
          <table:table-cell table:number-columns-repeated="16377"/>
        </table:table-row>
        <table:table-row table:style-name="ro1">
          <table:table-cell/>
          <table:table-cell table:style-name="ce514" office:value-type="string" calcext:value-type="string">
            <text:p>Préstamo</text:p>
          </table:table-cell>
          <table:table-cell table:style-name="ce519" table:formula="of:=+[$Costo_Deuda.E3]" office:value-type="float" office:value="12638.9483611111" calcext:value-type="float">
            <text:p>12,639 <text:s text:c="2"/></text:p>
          </table:table-cell>
          <table:table-cell table:style-name="ce519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apital </text:p>
          </table:table-cell>
          <table:table-cell/>
          <table:table-cell table:formula="of:=+-[$Costo_Deuda.K14]" office:value-type="float" office:value="-5899.79170065996" calcext:value-type="float">
            <text:p>-5,900 <text:s text:c="2"/></text:p>
          </table:table-cell>
          <table:table-cell table:formula="of:=+-[$Costo_Deuda.K16]" office:value-type="float" office:value="-6739.15666045115" calcext:value-type="float">
            <text:p>-6,739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/>
          <table:table-cell table:formula="of:=-[$Costo_Deuda.J18]" office:value-type="float" office:value="-1337.55066380761" calcext:value-type="float">
            <text:p>-1,338 <text:s text:c="2"/></text:p>
          </table:table-cell>
          <table:table-cell table:formula="of:=-[$Costo_Deuda.J20]" office:value-type="float" office:value="-498.185704016423" calcext:value-type="float">
            <text:p>-498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cudo fiscal de intereses</text:p>
          </table:table-cell>
          <table:table-cell/>
          <table:table-cell table:formula="of:=-+[$Resumen.$C$12]*[$'FLUJO DE CAJA'.D22]" office:value-type="float" office:value="394.577445823244" calcext:value-type="float">
            <text:p>395 <text:s text:c="2"/></text:p>
          </table:table-cell>
          <table:table-cell table:formula="of:=-+[$Resumen.$C$12]*[$'FLUJO DE CAJA'.E22]" office:value-type="float" office:value="146.964782684845" calcext:value-type="float">
            <text:p>147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515" office:value-type="string" calcext:value-type="string">
            <text:p>Flujo de Caja de la Deuda, FCD</text:p>
          </table:table-cell>
          <table:table-cell table:style-name="ce520" table:formula="of:=SUM([.C20:.C23])" office:value-type="float" office:value="12638.9483611111" calcext:value-type="float">
            <text:p>12,639 <text:s text:c="2"/></text:p>
          </table:table-cell>
          <table:table-cell table:style-name="ce520" table:formula="of:=SUM([.D20:.D23])" office:value-type="float" office:value="-6842.76491864433" calcext:value-type="float">
            <text:p>-6,843 <text:s text:c="2"/></text:p>
          </table:table-cell>
          <table:table-cell table:style-name="ce520" table:formula="of:=SUM([.E20:.E23])" office:value-type="float" office:value="-7090.37758178273" calcext:value-type="float">
            <text:p>-7,090 <text:s text:c="2"/></text:p>
          </table:table-cell>
          <table:table-cell table:style-name="ce520"/>
          <table:table-cell table:number-columns-repeated="16378"/>
        </table:table-row>
        <table:table-row table:style-name="ro1">
          <table:table-cell/>
          <table:table-cell table:style-name="ce513" office:value-type="string" calcext:value-type="string">
            <text:p>Flujo de Caja Financiero, FCF</text:p>
          </table:table-cell>
          <table:table-cell table:style-name="ce518" table:formula="of:=[.C16]+[.C24]" office:value-type="float" office:value="-14989.4444444444" calcext:value-type="float">
            <text:p>-14,989 <text:s text:c="2"/></text:p>
          </table:table-cell>
          <table:table-cell table:style-name="ce518" table:formula="of:=[.D16]+[.D24]" office:value-type="float" office:value="15708.7269379856" calcext:value-type="float">
            <text:p>15,709 <text:s text:c="2"/></text:p>
          </table:table-cell>
          <table:table-cell table:style-name="ce518" table:formula="of:=[.E16]+[.E24]" office:value-type="float" office:value="15937.282495525" calcext:value-type="float">
            <text:p>15,937 <text:s text:c="2"/></text:p>
          </table:table-cell>
          <table:table-cell table:style-name="ce518" table:formula="of:=[.F16]+[.F24]" office:value-type="float" office:value="47203.8624326366" calcext:value-type="float">
            <text:p>47,204 <text:s text:c="2"/></text:p>
          </table:table-cell>
          <table:table-cell table:number-columns-repeated="16378"/>
        </table:table-row>
        <table:table-row table:style-name="ro17">
          <table:table-cell/>
          <table:table-cell table:style-name="ce200"/>
          <table:table-cell table:style-name="ce521" table:number-columns-repeated="4"/>
          <table:table-cell table:number-columns-repeated="16378"/>
        </table:table-row>
        <table:table-row table:style-name="ro1">
          <table:table-cell/>
          <table:table-cell table:style-name="ce513" office:value-type="string" calcext:value-type="string">
            <text:p>FCF Ajustado</text:p>
          </table:table-cell>
          <table:table-cell table:style-name="ce522" table:formula="of:=[.C16]+[.C23]" office:value-type="float" office:value="-27628.3928055556" calcext:value-type="float">
            <text:p>-27628</text:p>
          </table:table-cell>
          <table:table-cell table:style-name="ce522" table:formula="of:=[.D16]+[.D23]" office:value-type="float" office:value="22946.0693024531" calcext:value-type="float">
            <text:p>22946</text:p>
          </table:table-cell>
          <table:table-cell table:style-name="ce522" table:formula="of:=[.E16]+[.E23]" office:value-type="float" office:value="23174.6248599925" calcext:value-type="float">
            <text:p>23175</text:p>
          </table:table-cell>
          <table:table-cell table:style-name="ce522" table:formula="of:=[.F16]+[.F23]" office:value-type="float" office:value="47203.8624326366" calcext:value-type="float">
            <text:p>472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*) Régimen laboral pequeña empresa</text:p>
          </table:table-cell>
          <table:table-cell table:style-name="ce200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**) Régimen MYPE Tributario</text:p>
          </table:table-cell>
          <table:table-cell table:style-name="ce200" table:number-columns-repeated="4"/>
          <table:table-cell table:number-columns-repeated="16378"/>
        </table:table-row>
      </table:table>
      <table:table table:name="Rentabilidad" table:style-name="ta19">
        <table:table-column table:style-name="co59" table:default-cell-style-name="Default"/>
        <table:table-column table:style-name="co60" table:default-cell-style-name="Default"/>
        <table:table-column table:style-name="co61" table:default-cell-style-name="ce526"/>
        <table:table-column table:style-name="co48" table:default-cell-style-name="Default"/>
        <table:table-column table:style-name="co37" table:default-cell-style-name="ce426"/>
        <table:table-column table:style-name="co1" table:default-cell-style-name="ce426"/>
        <table:table-column table:style-name="co5" table:default-cell-style-name="ce526"/>
        <table:table-column table:style-name="co15" table:default-cell-style-name="Default"/>
        <table:table-column table:style-name="co37" table:default-cell-style-name="ce426"/>
        <table:table-column table:style-name="co1" table:number-columns-repeated="24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11" table:default-cell-style-name="Default"/>
        <table:table-column table:style-name="co1" table:number-columns-repeated="248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524" office:value-type="string" calcext:value-type="string" table:number-columns-spanned="2" table:number-rows-spanned="1">
            <text:p>EMPRESA NO DIVERSIFICADA</text:p>
          </table:table-cell>
          <table:covered-table-cell table:style-name="ce529"/>
          <table:table-cell table:style-name="Default" table:number-columns-repeated="2"/>
          <table:table-cell table:style-name="ce524" office:value-type="string" calcext:value-type="string" table:number-columns-spanned="2" table:number-rows-spanned="1">
            <text:p>EMPRESA DIVERSIFICADA</text:p>
          </table:table-cell>
          <table:covered-table-cell table:style-name="ce529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5"/>
        </table:table-row>
        <table:table-row table:style-name="ro18">
          <table:table-cell/>
          <table:table-cell table:style-name="ce362"/>
          <table:table-cell table:style-name="ce362" office:value-type="string" calcext:value-type="string">
            <text:p>EVALUACIÓN ECONÓMICA</text:p>
          </table:table-cell>
          <table:table-cell/>
          <table:table-cell table:style-name="Default" table:number-columns-repeated="2"/>
          <table:table-cell table:style-name="ce362" office:value-type="string" calcext:value-type="string">
            <text:p>EVALUACIÓN ECONÓMICA</text:p>
          </table:table-cell>
          <table:table-cell/>
          <table:table-cell table:style-name="Default"/>
          <table:table-cell table:number-columns-repeated="4"/>
          <table:table-cell table:style-name="ce546" office:value-type="string" calcext:value-type="string">
            <text:p>Ki<text:span text:style-name="T34"> real</text:span><text:span text:style-name="T35">  =  </text:span><text:span text:style-name="T36">(1+ Ki </text:span><text:span text:style-name="T37">nominal</text:span><text:span text:style-name="T38">) - 1                                                                               </text:span></text:p>
          </table:table-cell>
          <table:table-cell table:number-columns-repeated="16370"/>
        </table:table-row>
        <table:table-row table:style-name="ro19">
          <table:table-cell/>
          <table:table-cell table:style-name="ce362" table:number-columns-repeated="2"/>
          <table:table-cell/>
          <table:table-cell table:style-name="Default" table:number-columns-repeated="2"/>
          <table:table-cell table:style-name="ce362"/>
          <table:table-cell/>
          <table:table-cell table:style-name="Default"/>
          <table:table-cell table:number-columns-repeated="4"/>
          <table:table-cell table:style-name="ce546"/>
          <table:table-cell table:style-name="ce548" office:value-type="string" calcext:value-type="string" table:number-columns-spanned="2" table:number-rows-spanned="1">
            <text:p>( 1 + dev)</text:p>
          </table:table-cell>
          <table:covered-table-cell table:style-name="ce549"/>
          <table:table-cell table:number-columns-repeated="16368"/>
        </table:table-row>
        <table:table-row table:style-name="ro12">
          <table:table-cell/>
          <table:table-cell table:style-name="ce362"/>
          <table:table-cell table:style-name="ce525" office:value-type="string" calcext:value-type="string">
            <text:p>Tasas y Criterios</text:p>
          </table:table-cell>
          <table:table-cell table:style-name="ce530" office:value-type="string" calcext:value-type="string">
            <text:p>Valor</text:p>
          </table:table-cell>
          <table:table-cell table:style-name="ce541"/>
          <table:table-cell/>
          <table:table-cell table:style-name="ce525" office:value-type="string" calcext:value-type="string">
            <text:p>Tasas y Criterios</text:p>
          </table:table-cell>
          <table:table-cell table:style-name="ce530" office:value-type="string" calcext:value-type="string">
            <text:p>Valor</text:p>
          </table:table-cell>
          <table:table-cell table:style-name="ce541"/>
          <table:table-cell table:number-columns-repeated="4"/>
          <table:table-cell table:style-name="ce546"/>
          <table:table-cell table:number-columns-repeated="16370"/>
        </table:table-row>
        <table:table-row table:style-name="ro19">
          <table:table-cell table:number-columns-repeated="2"/>
          <table:table-cell office:value-type="string" calcext:value-type="string">
            <text:p>Kurt nominal en dólares</text:p>
          </table:table-cell>
          <table:table-cell table:style-name="ce531" table:formula="of:=+[$'COK=Ku'.C12]" office:value-type="percentage" office:value="0.2293" calcext:value-type="percentage">
            <text:p>22.93 %</text:p>
          </table:table-cell>
          <table:table-cell table:number-columns-repeated="2"/>
          <table:table-cell office:value-type="string" calcext:value-type="string">
            <text:p>Kurs nominal en dólares</text:p>
          </table:table-cell>
          <table:table-cell table:style-name="ce531" table:formula="of:=[$'COK=Ku'.I12]" office:value-type="percentage" office:value="0.109936" calcext:value-type="percentage">
            <text:p>10.99 %</text:p>
          </table:table-cell>
          <table:table-cell table:number-columns-repeated="5"/>
          <table:table-cell table:style-name="ce547"/>
          <table:table-cell table:number-columns-repeated="16370"/>
        </table:table-row>
        <table:table-row table:style-name="ro19">
          <table:table-cell table:number-columns-repeated="2"/>
          <table:table-cell office:value-type="string" calcext:value-type="string">
            <text:p>Devaluación dólar</text:p>
          </table:table-cell>
          <table:table-cell table:style-name="ce532" table:formula="of:=+[$Resumen.C6]" office:value-type="percentage" office:value="0.0277777777777778" calcext:value-type="percentage">
            <text:p>2.78 %</text:p>
          </table:table-cell>
          <table:table-cell table:number-columns-repeated="2"/>
          <table:table-cell office:value-type="string" calcext:value-type="string">
            <text:p>Devaluación dólar</text:p>
          </table:table-cell>
          <table:table-cell table:style-name="ce532" table:formula="of:=[.D9]" office:value-type="percentage" office:value="0.0277777777777778" calcext:value-type="percentage">
            <text:p>2.78 %</text:p>
          </table:table-cell>
          <table:table-cell table:number-columns-repeated="5"/>
          <table:table-cell table:style-name="ce546"/>
          <table:table-cell table:number-columns-repeated="16370"/>
        </table:table-row>
        <table:table-row table:style-name="ro19">
          <table:table-cell table:number-columns-repeated="2"/>
          <table:table-cell office:value-type="string" calcext:value-type="string">
            <text:p>Kurt <text:s/>real</text:p>
          </table:table-cell>
          <table:table-cell table:style-name="ce531" table:formula="of:=((1+[.D8])/(1+[.D9])) - 1" office:value-type="percentage" office:value="0.196075675675676" calcext:value-type="percentage">
            <text:p>19.61 %</text:p>
          </table:table-cell>
          <table:table-cell table:number-columns-repeated="2"/>
          <table:table-cell office:value-type="string" calcext:value-type="string">
            <text:p>Kurs real</text:p>
          </table:table-cell>
          <table:table-cell table:style-name="ce531" table:formula="of:=((1+[.H8])/(1+[.H9])) - 1" office:value-type="percentage" office:value="0.0799377297297297" calcext:value-type="percentage">
            <text:p>7.99 %</text:p>
          </table:table-cell>
          <table:table-cell table:number-columns-repeated="5"/>
          <table:table-cell table:style-name="ce546"/>
          <table:table-cell table:number-columns-repeated="16370"/>
        </table:table-row>
        <table:table-row table:style-name="ro1">
          <table:table-cell table:number-columns-repeated="2"/>
          <table:table-cell table:style-name="ce426"/>
          <table:table-cell table:style-name="ce533"/>
          <table:table-cell table:number-columns-repeated="2"/>
          <table:table-cell table:style-name="ce426"/>
          <table:table-cell table:style-name="ce533"/>
          <table:table-cell table:number-columns-repeated="16376"/>
        </table:table-row>
        <table:table-row table:style-name="ro1">
          <table:table-cell table:number-columns-repeated="2"/>
          <table:table-cell table:style-name="ce527" office:value-type="string" calcext:value-type="string">
            <text:p>VANE =</text:p>
          </table:table-cell>
          <table:table-cell table:style-name="ce534" table:formula="of:=+NPV([.D10];[$'FLUJO DE CAJA'.D16:.F16])+[$'FLUJO DE CAJA'.C16]" office:value-type="float" office:value="34909.5300479208" calcext:value-type="float">
            <text:p><text:s/>34,910 </text:p>
          </table:table-cell>
          <table:table-cell table:style-name="ce542" office:value-type="string" calcext:value-type="string">
            <text:p>dólares</text:p>
          </table:table-cell>
          <table:table-cell/>
          <table:table-cell table:style-name="ce527" office:value-type="string" calcext:value-type="string">
            <text:p>VANE =</text:p>
          </table:table-cell>
          <table:table-cell table:style-name="ce545" table:formula="of:=NPV([.H10];[$'FLUJO DE CAJA'.D16:.F16])+[$'FLUJO DE CAJA'.C16]" office:value-type="float" office:value="50477.0362091635" calcext:value-type="float">
            <text:p><text:s/>50,477 </text:p>
          </table:table-cell>
          <table:table-cell table:style-name="ce542" office:value-type="string" calcext:value-type="string">
            <text:p>dólar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26"/>
          <table:table-cell table:style-name="ce535"/>
          <table:table-cell table:number-columns-repeated="2"/>
          <table:table-cell table:style-name="ce426"/>
          <table:table-cell table:style-name="ce535"/>
          <table:table-cell table:number-columns-repeated="16376"/>
        </table:table-row>
        <table:table-row table:style-name="ro1">
          <table:table-cell table:number-columns-repeated="2"/>
          <table:table-cell table:style-name="ce527" office:value-type="string" calcext:value-type="string">
            <text:p>TIRE =</text:p>
          </table:table-cell>
          <table:table-cell table:style-name="ce536" table:formula="of:=+IRR([$'FLUJO DE CAJA'.C16:.F16])" office:value-type="percentage" office:value="0.803590613835939" calcext:value-type="percentage">
            <text:p>80.36 %</text:p>
          </table:table-cell>
          <table:table-cell table:style-name="ce541" office:value-type="string" calcext:value-type="string">
            <text:p>anual</text:p>
          </table:table-cell>
          <table:table-cell/>
          <table:table-cell table:style-name="ce527" office:value-type="string" calcext:value-type="string">
            <text:p>TIRE =</text:p>
          </table:table-cell>
          <table:table-cell table:style-name="ce536" table:formula="of:=IRR([$'FLUJO DE CAJA'.C16:.F16])" office:value-type="percentage" office:value="0.803590613835939" calcext:value-type="percentage">
            <text:p>80.36 %</text:p>
          </table:table-cell>
          <table:table-cell table:style-name="ce541"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26" table:number-columns-repeated="2"/>
          <table:table-cell table:number-columns-repeated="2"/>
          <table:table-cell table:style-name="ce426" table:number-columns-repeated="2"/>
          <table:table-cell table:number-columns-repeated="16376"/>
        </table:table-row>
        <table:table-row table:style-name="ro1">
          <table:table-cell/>
          <table:table-cell table:style-name="ce362"/>
          <table:table-cell table:style-name="ce528" office:value-type="string" calcext:value-type="string">
            <text:p>EVALUACIÓN FINANCIERA</text:p>
          </table:table-cell>
          <table:table-cell table:style-name="ce426"/>
          <table:table-cell table:number-columns-repeated="2"/>
          <table:table-cell table:style-name="ce528" office:value-type="string" calcext:value-type="string">
            <text:p>EVALUACIÓN FINANCIERA</text:p>
          </table:table-cell>
          <table:table-cell table:style-name="ce426"/>
          <table:table-cell table:number-columns-repeated="16376"/>
        </table:table-row>
        <table:table-row table:style-name="ro1" table:number-rows-repeated="2">
          <table:table-cell/>
          <table:table-cell table:style-name="ce362"/>
          <table:table-cell table:style-name="ce528"/>
          <table:table-cell table:style-name="ce426"/>
          <table:table-cell table:number-columns-repeated="2"/>
          <table:table-cell table:style-name="ce528"/>
          <table:table-cell table:style-name="ce426"/>
          <table:table-cell table:number-columns-repeated="16376"/>
        </table:table-row>
        <table:table-row table:style-name="ro1">
          <table:table-cell table:number-columns-repeated="2"/>
          <table:table-cell table:style-name="ce525" office:value-type="string" calcext:value-type="string">
            <text:p>Tasas y Criterios</text:p>
          </table:table-cell>
          <table:table-cell table:style-name="ce530" office:value-type="string" calcext:value-type="string">
            <text:p>Valor</text:p>
          </table:table-cell>
          <table:table-cell table:style-name="ce541"/>
          <table:table-cell/>
          <table:table-cell table:style-name="ce525" office:value-type="string" calcext:value-type="string">
            <text:p>Tasas y Criterios</text:p>
          </table:table-cell>
          <table:table-cell table:style-name="ce530" office:value-type="string" calcext:value-type="string">
            <text:p>Valor</text:p>
          </table:table-cell>
          <table:table-cell table:style-name="ce541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TEA nominal</text:p>
          </table:table-cell>
          <table:table-cell table:style-name="ce532" office:value-type="percentage" office:value="0.174" calcext:value-type="percentage">
            <text:p>17.40 %</text:p>
          </table:table-cell>
          <table:table-cell table:number-columns-repeated="2"/>
          <table:table-cell office:value-type="string" calcext:value-type="string">
            <text:p>TEA nominal</text:p>
          </table:table-cell>
          <table:table-cell table:style-name="ce532" office:value-type="percentage" office:value="0.174" calcext:value-type="percentage">
            <text:p>17.40 %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TEA real</text:p>
          </table:table-cell>
          <table:table-cell table:style-name="ce537" table:formula="of:=((1+[.D20])/(1+[.D9])) -1" office:value-type="percentage" office:value="0.14227027027027" calcext:value-type="percentage">
            <text:p>14.2%</text:p>
          </table:table-cell>
          <table:table-cell table:number-columns-repeated="2"/>
          <table:table-cell office:value-type="string" calcext:value-type="string">
            <text:p>TEA real</text:p>
          </table:table-cell>
          <table:table-cell table:style-name="ce537" table:formula="of:=((1+[.H20])/(1+[.H9])) -1" office:value-type="percentage" office:value="0.14227027027027" calcext:value-type="percentage">
            <text:p>14.2%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26"/>
          <table:table-cell table:style-name="ce535"/>
          <table:table-cell table:number-columns-repeated="2"/>
          <table:table-cell table:style-name="ce426"/>
          <table:table-cell table:style-name="ce535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VAEFI =</text:p>
          </table:table-cell>
          <table:table-cell table:style-name="ce538" table:formula="of:=+NPV([.D21];[$'FLUJO DE CAJA'.D23:.E23])" office:value-type="float" office:value="458.068211236533" calcext:value-type="float">
            <text:p>458 <text:s text:c="2"/></text:p>
          </table:table-cell>
          <table:table-cell table:number-columns-repeated="2"/>
          <table:table-cell office:value-type="string" calcext:value-type="string">
            <text:p>VAEFI =</text:p>
          </table:table-cell>
          <table:table-cell table:style-name="ce538" table:formula="of:=NPV([.H21];[$'FLUJO DE CAJA'.D23:.E23])" office:value-type="float" office:value="458.068211236533" calcext:value-type="float">
            <text:p>458 <text:s text:c="2"/>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26"/>
          <table:table-cell table:style-name="ce535"/>
          <table:table-cell table:number-columns-repeated="2"/>
          <table:table-cell table:style-name="ce426"/>
          <table:table-cell table:style-name="ce535"/>
          <table:table-cell table:number-columns-repeated="16376"/>
        </table:table-row>
        <table:table-row table:style-name="ro1">
          <table:table-cell table:number-columns-repeated="2"/>
          <table:table-cell table:style-name="ce527" office:value-type="string" calcext:value-type="string">
            <text:p>VAN Ajustado =VANF=</text:p>
          </table:table-cell>
          <table:table-cell table:style-name="ce539" table:formula="of:=[.D12]+[.D23]" office:value-type="float" office:value="35367.5982591573" calcext:value-type="float">
            <text:p><text:s/>35,368 <text:s text:c="3"/></text:p>
          </table:table-cell>
          <table:table-cell table:style-name="ce542" office:value-type="string" calcext:value-type="string">
            <text:p>dólares</text:p>
          </table:table-cell>
          <table:table-cell/>
          <table:table-cell table:style-name="ce527" office:value-type="string" calcext:value-type="string">
            <text:p>VAN Ajustado =VANF=</text:p>
          </table:table-cell>
          <table:table-cell table:style-name="ce539" table:formula="of:=[.H12]+[.H23]" office:value-type="float" office:value="50935.1044204001" calcext:value-type="float">
            <text:p><text:s/>50,935 <text:s text:c="3"/></text:p>
          </table:table-cell>
          <table:table-cell table:style-name="ce542" office:value-type="string" calcext:value-type="string">
            <text:p>dólar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26"/>
          <table:table-cell table:style-name="ce535"/>
          <table:table-cell table:style-name="ce543"/>
          <table:table-cell/>
          <table:table-cell table:style-name="ce426"/>
          <table:table-cell table:style-name="ce535"/>
          <table:table-cell table:style-name="ce543"/>
          <table:table-cell table:number-columns-repeated="16375"/>
        </table:table-row>
        <table:table-row table:style-name="ro1">
          <table:table-cell table:number-columns-repeated="2"/>
          <table:table-cell table:style-name="ce527" office:value-type="string" calcext:value-type="string">
            <text:p>TIRF Ajustado =</text:p>
          </table:table-cell>
          <table:table-cell table:style-name="ce540" table:formula="of:=+IRR([$'FLUJO DE CAJA'.C27:.F27])" office:value-type="percentage" office:value="0.812983685869219" calcext:value-type="percentage">
            <text:p>81.3%</text:p>
          </table:table-cell>
          <table:table-cell table:style-name="ce544" office:value-type="string" calcext:value-type="string">
            <text:p>anual</text:p>
          </table:table-cell>
          <table:table-cell/>
          <table:table-cell table:style-name="ce527" office:value-type="string" calcext:value-type="string">
            <text:p>TIRF Ajustado =</text:p>
          </table:table-cell>
          <table:table-cell table:style-name="ce540" table:formula="of:=IRR([$'FLUJO DE CAJA'.C27:.F27])" office:value-type="percentage" office:value="0.812983685869219" calcext:value-type="percentage">
            <text:p>81.3%</text:p>
          </table:table-cell>
          <table:table-cell table:style-name="ce544" office:value-type="string" calcext:value-type="string">
            <text:p>anual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5" number:min-decimal-places="5" number:min-integer-digits="1" number:grouping="true"/>
    </number:number-style>
    <number:currency-style style:name="N138">
      <number:currency-symbol number:language="es" number:country="PE">S/.</number:currency-symbol>
      <number:text> </number:text>
      <number:number number:decimal-places="2" number:min-decimal-places="2" number:min-integer-digits="1" number:grouping="true"/>
    </number:currency-style>
    <number:currency-style style:name="N139">
      <number:currency-symbol number:language="es" number:country="US">$</number:currency-symbol>
      <number:number number:decimal-places="2" number:min-decimal-places="2" number:min-integer-digits="1" number:grouping="true"/>
    </number:currency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number number:decimal-places="0" number:min-decimal-places="0" number:min-integer-digits="1" number:grouping="true"/>
      <number:text loext:blank-width-char="€1">   </number:text>
    </number:number-style>
    <number:number-style style:name="N14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20_inicial" style:display-name="PageStyle_Inversión 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2" style:display-name="PageStyle_Resumen del escenari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is_20_de_20_sensibilidad" style:display-name="PageStyle_Análisis de 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de_20_producción" style:display-name="PageStyle_Costo de produc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20_de_20_ventas" style:display-name="PageStyle_Presupuesto de 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" style:display-name="PageStyle_Depreci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20_operativos" style:display-name="PageStyle_Gastos 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unitario" style:display-name="PageStyle_Costo unit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5f_Deuda" style:display-name="PageStyle_Cost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K_3d_Ku" style:display-name="PageStyle_COK=K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" style:display-name="PageStyle_FLUJO DE CA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rt_20_y_20_Wacc" style:display-name="PageStyle_Kert y 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dc:creator>E. Edison Achalma Mendoza</dc:creator>
    <meta:creation-date>2021-02-28T21:46:09</meta:creation-date>
    <dc:date>2022-06-03T01:34:46</dc:date>
    <meta:generator>LibreOffice/24.2.4.2$Linux_X86_64 LibreOffice_project/420$Build-2</meta:generator>
    <meta:document-statistic meta:table-count="21" meta:cell-count="2683" meta:object-count="1"/>
    <meta:user-defined meta:name="AppVersion">16.0300</meta:user-defined>
  </office:meta>
</office:document-meta>
</file>