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1.845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0.951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819cm"/>
    </style:style>
    <style:style style:name="co9" style:family="table-column">
      <style:table-column-properties fo:break-before="auto" style:column-width="2.406cm"/>
    </style:style>
    <style:style style:name="co10" style:family="table-column">
      <style:table-column-properties fo:break-before="auto" style:column-width="2.545cm"/>
    </style:style>
    <style:style style:name="co11" style:family="table-column">
      <style:table-column-properties fo:break-before="auto" style:column-width="0.923cm"/>
    </style:style>
    <style:style style:name="co12" style:family="table-column">
      <style:table-column-properties fo:break-before="auto" style:column-width="1.958cm"/>
    </style:style>
    <style:style style:name="co13" style:family="table-column">
      <style:table-column-properties fo:break-before="auto" style:column-width="2.88cm"/>
    </style:style>
    <style:style style:name="co14" style:family="table-column">
      <style:table-column-properties fo:break-before="auto" style:column-width="0.755cm"/>
    </style:style>
    <style:style style:name="co15" style:family="table-column">
      <style:table-column-properties fo:break-before="auto" style:column-width="0.979cm"/>
    </style:style>
    <style:style style:name="co16" style:family="table-column">
      <style:table-column-properties fo:break-before="auto" style:column-width="2.265cm"/>
    </style:style>
    <style:style style:name="co17" style:family="table-column">
      <style:table-column-properties fo:break-before="auto" style:column-width="0.392cm"/>
    </style:style>
    <style:style style:name="co18" style:family="table-column">
      <style:table-column-properties fo:break-before="auto" style:column-width="6.685cm"/>
    </style:style>
    <style:style style:name="co19" style:family="table-column">
      <style:table-column-properties fo:break-before="auto" style:column-width="1.734cm"/>
    </style:style>
    <style:style style:name="co20" style:family="table-column">
      <style:table-column-properties fo:break-before="auto" style:column-width="3.189cm"/>
    </style:style>
    <style:style style:name="co21" style:family="table-column">
      <style:table-column-properties fo:break-before="auto" style:column-width="3.272cm"/>
    </style:style>
    <style:style style:name="co22" style:family="table-column">
      <style:table-column-properties fo:break-before="auto" style:column-width="5.93cm"/>
    </style:style>
    <style:style style:name="co23" style:family="table-column">
      <style:table-column-properties fo:break-before="auto" style:column-width="2.574cm"/>
    </style:style>
    <style:style style:name="co24" style:family="table-column">
      <style:table-column-properties fo:break-before="auto" style:column-width="2.489cm"/>
    </style:style>
    <style:style style:name="co25" style:family="table-column">
      <style:table-column-properties fo:break-before="auto" style:column-width="1.762cm"/>
    </style:style>
    <style:style style:name="co26" style:family="table-column">
      <style:table-column-properties fo:break-before="auto" style:column-width="3.664cm"/>
    </style:style>
    <style:style style:name="co27" style:family="table-column">
      <style:table-column-properties fo:break-before="auto" style:column-width="2.35cm"/>
    </style:style>
    <style:style style:name="co28" style:family="table-column">
      <style:table-column-properties fo:break-before="auto" style:column-width="2.182cm"/>
    </style:style>
    <style:style style:name="co29" style:family="table-column">
      <style:table-column-properties fo:break-before="auto" style:column-width="2.824cm"/>
    </style:style>
    <style:style style:name="co30" style:family="table-column">
      <style:table-column-properties fo:break-before="auto" style:column-width="1.79cm"/>
    </style:style>
    <style:style style:name="co31" style:family="table-column">
      <style:table-column-properties fo:break-before="auto" style:column-width="5.286cm"/>
    </style:style>
    <style:style style:name="co32" style:family="table-column">
      <style:table-column-properties fo:break-before="auto" style:column-width="0.894cm"/>
    </style:style>
    <style:style style:name="co33" style:family="table-column">
      <style:table-column-properties fo:break-before="auto" style:column-width="2.258cm"/>
    </style:style>
    <style:style style:name="co34" style:family="table-column">
      <style:table-column-properties fo:break-before="auto" style:column-width="2.461cm"/>
    </style:style>
    <style:style style:name="co35" style:family="table-column">
      <style:table-column-properties fo:break-before="auto" style:column-width="7.105cm"/>
    </style:style>
    <style:style style:name="co36" style:family="table-column">
      <style:table-column-properties fo:break-before="auto" style:column-width="2.798cm"/>
    </style:style>
    <style:style style:name="co37" style:family="table-column">
      <style:table-column-properties fo:break-before="auto" style:column-width="5.789cm"/>
    </style:style>
    <style:style style:name="co38" style:family="table-column">
      <style:table-column-properties fo:break-before="auto" style:column-width="4.364cm"/>
    </style:style>
    <style:style style:name="co39" style:family="table-column">
      <style:table-column-properties fo:break-before="auto" style:column-width="0.866cm"/>
    </style:style>
    <style:style style:name="co40" style:family="table-column">
      <style:table-column-properties fo:break-before="auto" style:column-width="5.034cm"/>
    </style:style>
    <style:style style:name="co41" style:family="table-column">
      <style:table-column-properties fo:break-before="auto" style:column-width="2.154cm"/>
    </style:style>
    <style:style style:name="co42" style:family="table-column">
      <style:table-column-properties fo:break-before="auto" style:column-width="2.656cm"/>
    </style:style>
    <style:style style:name="co43" style:family="table-column">
      <style:table-column-properties fo:break-before="auto" style:column-width="3.524cm"/>
    </style:style>
    <style:style style:name="co44" style:family="table-column">
      <style:table-column-properties fo:break-before="auto" style:column-width="2.21cm"/>
    </style:style>
    <style:style style:name="co45" style:family="table-column">
      <style:table-column-properties fo:break-before="auto" style:column-width="2.432cm"/>
    </style:style>
    <style:style style:name="co46" style:family="table-column">
      <style:table-column-properties fo:break-before="auto" style:column-width="0.448cm"/>
    </style:style>
    <style:style style:name="co47" style:family="table-column">
      <style:table-column-properties fo:break-before="auto" style:column-width="2.517cm"/>
    </style:style>
    <style:style style:name="co48" style:family="table-column">
      <style:table-column-properties fo:break-before="auto" style:column-width="2.293cm"/>
    </style:style>
    <style:style style:name="co49" style:family="table-column">
      <style:table-column-properties fo:break-before="auto" style:column-width="3.133cm"/>
    </style:style>
    <style:style style:name="co50" style:family="table-column">
      <style:table-column-properties fo:break-before="auto" style:column-width="0.644cm"/>
    </style:style>
    <style:style style:name="co51" style:family="table-column">
      <style:table-column-properties fo:break-before="auto" style:column-width="3.161cm"/>
    </style:style>
    <style:style style:name="co52" style:family="table-column">
      <style:table-column-properties fo:break-before="auto" style:column-width="3.581cm"/>
    </style:style>
    <style:style style:name="co53" style:family="table-column">
      <style:table-column-properties fo:break-before="auto" style:column-width="0.783cm"/>
    </style:style>
    <style:style style:name="co54" style:family="table-column">
      <style:table-column-properties fo:break-before="auto" style:column-width="3.385cm"/>
    </style:style>
    <style:style style:name="co55" style:family="table-column">
      <style:table-column-properties fo:break-before="auto" style:column-width="5.482cm"/>
    </style:style>
    <style:style style:name="co56" style:family="table-column">
      <style:table-column-properties fo:break-before="auto" style:column-width="1.873cm"/>
    </style:style>
    <style:style style:name="co57" style:family="table-column">
      <style:table-column-properties fo:break-before="auto" style:column-width="1.986cm"/>
    </style:style>
    <style:style style:name="co58" style:family="table-column">
      <style:table-column-properties fo:break-before="auto" style:column-width="2.014cm"/>
    </style:style>
    <style:style style:name="co59" style:family="table-column">
      <style:table-column-properties fo:break-before="auto" style:column-width="1.93cm"/>
    </style:style>
    <style:style style:name="co60" style:family="table-column">
      <style:table-column-properties fo:break-before="auto" style:column-width="1.901cm"/>
    </style:style>
    <style:style style:name="co61" style:family="table-column">
      <style:table-column-properties fo:break-before="auto" style:column-width="4.699cm"/>
    </style:style>
    <style:style style:name="co62" style:family="table-column">
      <style:table-column-properties fo:break-before="auto" style:column-width="1.399cm"/>
    </style:style>
    <style:style style:name="co63" style:family="table-column">
      <style:table-column-properties fo:break-before="auto" style:column-width="4.782cm"/>
    </style:style>
    <style:style style:name="co64" style:family="table-column">
      <style:table-column-properties fo:break-before="auto" style:column-width="1.258cm"/>
    </style:style>
    <style:style style:name="co65" style:family="table-column">
      <style:table-column-properties fo:break-before="auto" style:column-width="2.965cm"/>
    </style:style>
    <style:style style:name="co66" style:family="table-column">
      <style:table-column-properties fo:break-before="auto" style:column-width="4.44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106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1.058cm" fo:break-before="auto" style:use-optimal-row-height="fals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0.556cm" fo:break-before="auto" style:use-optimal-row-height="tru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0.476cm" fo:break-before="auto" style:use-optimal-row-height="false"/>
    </style:style>
    <style:style style:name="ro11" style:family="table-row">
      <style:table-row-properties style:row-height="0.714cm" fo:break-before="auto" style:use-optimal-row-height="false"/>
    </style:style>
    <style:style style:name="ro12" style:family="table-row">
      <style:table-row-properties style:row-height="0.423cm" fo:break-before="auto" style:use-optimal-row-height="false"/>
    </style:style>
    <style:style style:name="ro13" style:family="table-row">
      <style:table-row-properties style:row-height="0.45cm" fo:break-before="auto" style:use-optimal-row-height="true"/>
    </style:style>
    <style:style style:name="ro14" style:family="table-row">
      <style:table-row-properties style:row-height="0.609cm" fo:break-before="auto" style:use-optimal-row-height="false"/>
    </style:style>
    <style:style style:name="ro15" style:family="table-row">
      <style:table-row-properties style:row-height="0.582cm" fo:break-before="auto" style:use-optimal-row-height="false"/>
    </style:style>
    <style:style style:name="ro16" style:family="table-row">
      <style:table-row-properties style:row-height="0.503cm" fo:break-before="auto" style:use-optimal-row-height="false"/>
    </style:style>
    <style:style style:name="ro17" style:family="table-row">
      <style:table-row-properties style:row-height="0.926cm" fo:break-before="auto" style:use-optimal-row-height="false"/>
    </style:style>
    <style:style style:name="ro18" style:family="table-row">
      <style:table-row-properties style:row-height="0.9cm" fo:break-before="auto" style:use-optimal-row-height="false"/>
    </style:style>
    <style:style style:name="ro19" style:family="table-row">
      <style:table-row-properties style:row-height="1.085cm" fo:break-before="auto" style:use-optimal-row-height="false"/>
    </style:style>
    <style:style style:name="ro20" style:family="table-row">
      <style:table-row-properties style:row-height="1.164cm" fo:break-before="auto" style:use-optimal-row-height="false"/>
    </style:style>
    <style:style style:name="ro21" style:family="table-row">
      <style:table-row-properties style:row-height="1.455cm" fo:break-before="auto" style:use-optimal-row-height="false"/>
    </style:style>
    <style:style style:name="ro22" style:family="table-row">
      <style:table-row-properties style:row-height="0.635cm" fo:break-before="auto" style:use-optimal-row-height="false"/>
    </style:style>
    <style:style style:name="ta1" style:family="table" style:master-page-name="PageStyle_5f_Resumen_20_del_20_escenario_20_2">
      <style:table-properties table:display="true" style:writing-mode="lr-tb"/>
    </style:style>
    <style:style style:name="ta2" style:family="table" style:master-page-name="PageStyle_5f_Análisis_20_de_20_sensibilidad">
      <style:table-properties table:display="true" style:writing-mode="lr-tb"/>
    </style:style>
    <style:style style:name="ta3" style:family="table" style:master-page-name="PageStyle_5f_Análisis_20_de_20_sensibilidad">
      <style:table-properties table:display="false" style:writing-mode="lr-tb"/>
    </style:style>
    <style:style style:name="ta4" style:family="table" style:master-page-name="PageStyle_5f_Resumen">
      <style:table-properties table:display="true" style:writing-mode="lr-tb"/>
    </style:style>
    <style:style style:name="ta5" style:family="table" style:master-page-name="PageStyle_5f_Inversión_20_inicial">
      <style:table-properties table:display="true" style:writing-mode="lr-tb"/>
    </style:style>
    <style:style style:name="ta6" style:family="table" style:master-page-name="PageStyle_5f_Depreciación_20_y_20_VR">
      <style:table-properties table:display="true" style:writing-mode="lr-tb"/>
    </style:style>
    <style:style style:name="ta7" style:family="table" style:master-page-name="PageStyle_5f_Presupuesto_20_de_20_ventas">
      <style:table-properties table:display="true" style:writing-mode="lr-tb"/>
    </style:style>
    <style:style style:name="ta8" style:family="table" style:master-page-name="PageStyle_5f_Capital_5f_Trabajo">
      <style:table-properties table:display="true" style:writing-mode="lr-tb" table:tab-color="#ff0000"/>
    </style:style>
    <style:style style:name="ta9" style:family="table" style:master-page-name="PageStyle_5f_Costos_20_Ventas">
      <style:table-properties table:display="true" style:writing-mode="lr-tb"/>
    </style:style>
    <style:style style:name="ta10" style:family="table" style:master-page-name="PageStyle_5f_Sueldos">
      <style:table-properties table:display="true" style:writing-mode="lr-tb"/>
    </style:style>
    <style:style style:name="ta11" style:family="table" style:master-page-name="PageStyle_5f_Gastos_5f_Operativos">
      <style:table-properties table:display="true" style:writing-mode="lr-tb"/>
    </style:style>
    <style:style style:name="ta12" style:family="table" style:master-page-name="PageStyle_5f_Costos_20_unitarios">
      <style:table-properties table:display="true" style:writing-mode="lr-tb"/>
    </style:style>
    <style:style style:name="ta13" style:family="table" style:master-page-name="PageStyle_5f_Estado_20_de_20_resultados">
      <style:table-properties table:display="true" style:writing-mode="lr-tb"/>
    </style:style>
    <style:style style:name="ta14" style:family="table" style:master-page-name="PageStyle_5f_Punto_20_de_20_equilibrio">
      <style:table-properties table:display="true" style:writing-mode="lr-tb"/>
    </style:style>
    <style:style style:name="ta15" style:family="table" style:master-page-name="PageStyle_5f_Financiamiento">
      <style:table-properties table:display="true" style:writing-mode="lr-tb"/>
    </style:style>
    <style:style style:name="ta16" style:family="table" style:master-page-name="PageStyle_5f_Ku">
      <style:table-properties table:display="true" style:writing-mode="lr-tb"/>
    </style:style>
    <style:style style:name="ta17" style:family="table" style:master-page-name="PageStyle_5f_Ke_20_y_20_Wacc">
      <style:table-properties table:display="true" style:writing-mode="lr-tb"/>
    </style:style>
    <style:style style:name="ta18" style:family="table" style:master-page-name="PageStyle_5f_Flujo_20_de_20_caja">
      <style:table-properties table:display="true" style:writing-mode="lr-tb"/>
    </style:style>
    <style:style style:name="ta19" style:family="table" style:master-page-name="PageStyle_5f_Rentabilidad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/>
    <style:style style:name="ce2" style:family="table-cell" style:parent-style-name="Default">
      <style:table-cell-properties fo:border-bottom="none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none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 style:data-style-name="N10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 style:data-style-name="N1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 style:data-style-name="N133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 style:data-style-name="N11">
      <style:table-cell-properties fo:border-bottom="1.76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36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0.74pt solid #000000" fo:background-color="#00b0f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ackground-color="#a6a6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6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2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 style:data-style-name="N1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136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 style:data-style-name="N3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 style:data-style-name="N135">
      <style:table-cell-properties fo:background-color="#8faa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fo:border-bottom="0.74pt solid #000000" fo:background-color="#00b0f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 style:data-style-name="N10">
      <style:table-cell-properties fo:background-color="#a6a6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6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13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 style:data-style-name="N135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 style:data-style-name="N139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  <style:map style:condition="cell-content()&lt;0" style:apply-style-name="ConditionalStyle_5f_4" style:base-cell-address="'Análisis de sensibilidad'.E70"/>
    </style:style>
    <style:style style:name="ce40" style:family="table-cell" style:parent-style-name="Default" style:data-style-name="N136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136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1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 style:data-style-name="N2">
      <style:table-cell-properties fo:background-color="#a6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6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  <style:map style:condition="cell-content()&lt;0" style:apply-style-name="ConditionalStyle_5f_18" style:base-cell-address="'Análisis de sensibilidad'.F21"/>
    </style:style>
    <style:style style:name="ce47" style:family="table-cell" style:parent-style-name="Default" style:data-style-name="N2">
      <style:table-cell-properties fo:background-color="#00b0f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  <style:map style:condition="cell-content()&lt;0" style:apply-style-name="ConditionalStyle_5f_18" style:base-cell-address="'Análisis de sensibilidad'.F21"/>
    </style:style>
    <style:style style:name="ce48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  <style:map style:condition="cell-content()&lt;0" style:apply-style-name="ConditionalStyle_5f_12" style:base-cell-address="'Análisis de sensibilidad'.F37"/>
    </style:style>
    <style:style style:name="ce49" style:family="table-cell" style:parent-style-name="Default" style:data-style-name="N2">
      <style:table-cell-properties fo:background-color="#00b0f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  <style:map style:condition="cell-content()&lt;0" style:apply-style-name="ConditionalStyle_5f_12" style:base-cell-address="'Análisis de sensibilidad'.F37"/>
    </style:style>
    <style:style style:name="ce50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  <style:map style:condition="cell-content()&lt;0" style:apply-style-name="ConditionalStyle_5f_6" style:base-cell-address="'Análisis de sensibilidad'.F52"/>
    </style:style>
    <style:style style:name="ce51" style:family="table-cell" style:parent-style-name="Default" style:data-style-name="N2">
      <style:table-cell-properties fo:background-color="#00b0f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  <style:map style:condition="cell-content()&lt;0" style:apply-style-name="ConditionalStyle_5f_6" style:base-cell-address="'Análisis de sensibilidad'.F52"/>
    </style:style>
    <style:style style:name="ce52" style:family="table-cell" style:parent-style-name="Default">
      <style:table-cell-properties fo:background-color="#00b0f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Excel_20_Built-in_20_Percent" style:data-style-name="N11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 style:data-style-name="N11">
      <style:table-cell-properties fo:background-color="#a6a6a6" style:diagonal-bl-tr="none" style:diagonal-tl-br="none" fo:border="0.74pt solid #000000" style:rotation-align="none">
        <loext:background-complex-color loext:theme-type="light1" loext:color-type="theme">
          <loext:transformation loext:type="lummod" loext:value="6500"/>
        </loext:background-complex-color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Excel_20_Built-in_20_Percent" style:data-style-name="N11">
      <style:table-cell-properties fo:background-color="#00b0f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 style:data-style-name="N13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 style:data-style-name="N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 style:data-style-name="N136">
      <style:table-cell-properties fo:background-color="#a6a6a6" style:diagonal-bl-tr="none" style:diagonal-tl-br="none" fo:border="0.74pt solid #000000" style:rotation-align="none">
        <loext:background-complex-color loext:theme-type="light1" loext:color-type="theme">
          <loext:transformation loext:type="lummod" loext:value="6500"/>
        </loext:background-complex-color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 style:data-style-name="N1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  <style:map style:condition="cell-content()&lt;0" style:apply-style-name="ConditionalStyle_5f_17" style:base-cell-address="'Análisis de sensibilidad'.H21"/>
    </style:style>
    <style:style style:name="ce62" style:family="table-cell" style:parent-style-name="Default" style:data-style-name="N136">
      <style:table-cell-properties fo:background-color="#00b0f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  <style:map style:condition="cell-content()&lt;0" style:apply-style-name="ConditionalStyle_5f_17" style:base-cell-address="'Análisis de sensibilidad'.H21"/>
    </style:style>
    <style:style style:name="ce63" style:family="table-cell" style:parent-style-name="Default" style:data-style-name="N1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  <style:map style:condition="cell-content()&lt;0" style:apply-style-name="ConditionalStyle_5f_11" style:base-cell-address="'Análisis de sensibilidad'.H37"/>
    </style:style>
    <style:style style:name="ce64" style:family="table-cell" style:parent-style-name="Default" style:data-style-name="N136">
      <style:table-cell-properties fo:background-color="#00b0f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  <style:map style:condition="cell-content()&lt;0" style:apply-style-name="ConditionalStyle_5f_11" style:base-cell-address="'Análisis de sensibilidad'.H37"/>
    </style:style>
    <style:style style:name="ce65" style:family="table-cell" style:parent-style-name="Default" style:data-style-name="N1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  <style:map style:condition="cell-content()&lt;0" style:apply-style-name="ConditionalStyle_5f_5" style:base-cell-address="'Análisis de sensibilidad'.H52"/>
    </style:style>
    <style:style style:name="ce66" style:family="table-cell" style:parent-style-name="Default" style:data-style-name="N136">
      <style:table-cell-properties fo:background-color="#00b0f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  <style:map style:condition="cell-content()&lt;0" style:apply-style-name="ConditionalStyle_5f_5" style:base-cell-address="'Análisis de sensibilidad'.H52"/>
    </style:style>
    <style:style style:name="ce67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 style:data-style-name="N10">
      <style:table-cell-properties fo:background-color="#8faa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fo:background-color="#a6a6a6" style:diagonal-bl-tr="none" style:diagonal-tl-br="none" fo:border="0.74pt solid #000000" style:rotation-align="none">
        <loext:background-complex-color loext:theme-type="light1" loext:color-type="theme">
          <loext:transformation loext:type="lummod" loext:value="6500"/>
        </loext:background-complex-color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 style:data-style-name="N10">
      <style:table-cell-properties style:rotation-align="none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" style:family="table-cell" style:parent-style-name="Default" style:data-style-name="N3">
      <style:table-cell-properties fo:background-color="#a6a6a6" style:diagonal-bl-tr="none" style:diagonal-tl-br="none" fo:border="0.74pt solid #000000" style:rotation-align="none">
        <loext:background-complex-color loext:theme-type="light1" loext:color-type="theme">
          <loext:transformation loext:type="lummod" loext:value="6500"/>
        </loext:background-complex-color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  <style:map style:condition="cell-content()&lt;0" style:apply-style-name="ConditionalStyle_5f_16" style:base-cell-address="'Análisis de sensibilidad'.M21"/>
    </style:style>
    <style:style style:name="ce76" style:family="table-cell" style:parent-style-name="Default">
      <style:table-cell-properties fo:background-color="#00b0f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  <style:map style:condition="cell-content()&lt;0" style:apply-style-name="ConditionalStyle_5f_16" style:base-cell-address="'Análisis de sensibilidad'.M21"/>
    </style:style>
    <style:style style:name="ce77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  <style:map style:condition="cell-content()&lt;0" style:apply-style-name="ConditionalStyle_5f_10" style:base-cell-address="'Análisis de sensibilidad'.M37"/>
    </style:style>
    <style:style style:name="ce78" style:family="table-cell" style:parent-style-name="Default" style:data-style-name="N2">
      <style:table-cell-properties fo:background-color="#00b0f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  <style:map style:condition="cell-content()&lt;0" style:apply-style-name="ConditionalStyle_5f_10" style:base-cell-address="'Análisis de sensibilidad'.M37"/>
    </style:style>
    <style:style style:name="ce79" style:family="table-cell" style:parent-style-name="Default" style:data-style-name="N133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Default" style:data-style-name="N135">
      <style:table-cell-properties style:rotation-align="none"/>
    </style:style>
    <style:style style:name="ce81" style:family="table-cell" style:parent-style-name="Excel_20_Built-in_20_Percent" style:data-style-name="N11">
      <style:table-cell-properties fo:background-color="#a6a6a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6500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 style:data-style-name="N140">
      <style:table-cell-properties fo:background-color="#a6a6a6" style:diagonal-bl-tr="none" style:diagonal-tl-br="none" fo:border="0.74pt solid #000000" style:rotation-align="none">
        <loext:background-complex-color loext:theme-type="light1" loext:color-type="theme">
          <loext:transformation loext:type="lummod" loext:value="6500"/>
        </loext:background-complex-color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Default" style:data-style-name="N14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  <style:map style:condition="cell-content()&lt;0" style:apply-style-name="ConditionalStyle_5f_15" style:base-cell-address="'Análisis de sensibilidad'.O21"/>
    </style:style>
    <style:style style:name="ce84" style:family="table-cell" style:parent-style-name="Default" style:data-style-name="N140">
      <style:table-cell-properties fo:background-color="#00b0f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  <style:map style:condition="cell-content()&lt;0" style:apply-style-name="ConditionalStyle_5f_15" style:base-cell-address="'Análisis de sensibilidad'.O21"/>
    </style:style>
    <style:style style:name="ce85" style:family="table-cell" style:parent-style-name="Default" style:data-style-name="N14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  <style:map style:condition="cell-content()&lt;0" style:apply-style-name="ConditionalStyle_5f_9" style:base-cell-address="'Análisis de sensibilidad'.O37"/>
    </style:style>
    <style:style style:name="ce86" style:family="table-cell" style:parent-style-name="Default" style:data-style-name="N140">
      <style:table-cell-properties fo:background-color="#00b0f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  <style:map style:condition="cell-content()&lt;0" style:apply-style-name="ConditionalStyle_5f_9" style:base-cell-address="'Análisis de sensibilidad'.O37"/>
    </style:style>
    <style:style style:name="ce87" style:family="table-cell" style:parent-style-name="Excel_20_Built-in_20_Percent" style:data-style-name="N14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8" style:family="table-cell" style:parent-style-name="Default" style:data-style-name="N14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Excel_20_Built-in_20_Percent" style:data-style-name="N13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90" style:family="table-cell" style:parent-style-name="Default" style:data-style-name="N138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9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  <style:map style:condition="cell-content()&lt;0" style:apply-style-name="ConditionalStyle_5f_3" style:base-cell-address="'Análisis de sensibilidad'.U70"/>
    </style:style>
    <style:style style:name="ce98" style:family="table-cell" style:parent-style-name="Default" style:data-style-name="N143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Default" style:data-style-name="N136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  <style:map style:condition="cell-content()&lt;0" style:apply-style-name="ConditionalStyle_5f_1" style:base-cell-address="'Análisis de sensibilidad'.U84"/>
    </style:style>
    <style:style style:name="ce100" style:family="table-cell" style:parent-style-name="Default" style:data-style-name="N141">
      <style:table-cell-properties fo:background-color="#a6a6a6" style:diagonal-bl-tr="none" style:diagonal-tl-br="none" fo:border="0.74pt solid #000000" style:rotation-align="none">
        <loext:background-complex-color loext:theme-type="light1" loext:color-type="theme">
          <loext:transformation loext:type="lummod" loext:value="6500"/>
        </loext:background-complex-color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Default" style:data-style-name="N14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  <style:map style:condition="cell-content()&lt;0" style:apply-style-name="ConditionalStyle_5f_14" style:base-cell-address="'Análisis de sensibilidad'.V21"/>
    </style:style>
    <style:style style:name="ce102" style:family="table-cell" style:parent-style-name="Default" style:data-style-name="N141">
      <style:table-cell-properties fo:background-color="#00b0f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  <style:map style:condition="cell-content()&lt;0" style:apply-style-name="ConditionalStyle_5f_14" style:base-cell-address="'Análisis de sensibilidad'.V21"/>
    </style:style>
    <style:style style:name="ce103" style:family="table-cell" style:parent-style-name="Default" style:data-style-name="N14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  <style:map style:condition="cell-content()&lt;0" style:apply-style-name="ConditionalStyle_5f_8" style:base-cell-address="'Análisis de sensibilidad'.V37"/>
    </style:style>
    <style:style style:name="ce104" style:family="table-cell" style:parent-style-name="Default" style:data-style-name="N141">
      <style:table-cell-properties fo:background-color="#00b0f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  <style:map style:condition="cell-content()&lt;0" style:apply-style-name="ConditionalStyle_5f_8" style:base-cell-address="'Análisis de sensibilidad'.V37"/>
    </style:style>
    <style:style style:name="ce105" style:family="table-cell" style:parent-style-name="Default" style:data-style-name="N14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  <style:map style:condition="cell-content()&lt;0" style:apply-style-name="ConditionalStyle_5f_13" style:base-cell-address="'Análisis de sensibilidad'.X21"/>
    </style:style>
    <style:style style:name="ce106" style:family="table-cell" style:parent-style-name="Default" style:data-style-name="N140">
      <style:table-cell-properties fo:background-color="#00b0f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  <style:map style:condition="cell-content()&lt;0" style:apply-style-name="ConditionalStyle_5f_13" style:base-cell-address="'Análisis de sensibilidad'.X21"/>
    </style:style>
    <style:style style:name="ce107" style:family="table-cell" style:parent-style-name="Default" style:data-style-name="N14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  <style:map style:condition="cell-content()&lt;0" style:apply-style-name="ConditionalStyle_5f_7" style:base-cell-address="'Análisis de sensibilidad'.X37"/>
    </style:style>
    <style:style style:name="ce108" style:family="table-cell" style:parent-style-name="Default" style:data-style-name="N140">
      <style:table-cell-properties fo:background-color="#00b0f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  <style:map style:condition="cell-content()&lt;0" style:apply-style-name="ConditionalStyle_5f_7" style:base-cell-address="'Análisis de sensibilidad'.X37"/>
    </style:style>
    <style:style style:name="ce109" style:family="table-cell" style:parent-style-name="Default" style:data-style-name="N136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  <style:map style:condition="cell-content()&lt;0" style:apply-style-name="ConditionalStyle_5f_2" style:base-cell-address="'Análisis de sensibilidad'.AJ70"/>
    </style:style>
    <style:style style:name="ce110" style:family="table-cell" style:parent-style-name="Default">
      <style:table-cell-properties style:cell-protect="protected" style:print-content="true"/>
    </style:style>
    <style:style style:name="ce111" style:family="table-cell" style:parent-style-name="Default">
      <style:table-cell-properties style:cell-protect="protected" style:print-content="true"/>
      <style:map style:condition="cell-content()&lt;0" style:apply-style-name="ConditionalStyle_5f_4" style:base-cell-address="Probable.E70"/>
    </style:style>
    <style:style style:name="ce112" style:family="table-cell" style:parent-style-name="Default" style:data-style-name="N10">
      <style:table-cell-properties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Default">
      <style:table-cell-properties style:cell-protect="protected" style:print-content="true"/>
      <style:map style:condition="cell-content()&lt;0" style:apply-style-name="ConditionalStyle_5f_18" style:base-cell-address="Probable.F21"/>
    </style:style>
    <style:style style:name="ce114" style:family="table-cell" style:parent-style-name="Default">
      <style:table-cell-properties style:cell-protect="protected" style:print-content="true"/>
      <style:map style:condition="cell-content()&lt;0" style:apply-style-name="ConditionalStyle_5f_12" style:base-cell-address="Probable.F37"/>
    </style:style>
    <style:style style:name="ce115" style:family="table-cell" style:parent-style-name="Default">
      <style:table-cell-properties style:cell-protect="protected" style:print-content="true"/>
      <style:map style:condition="cell-content()&lt;0" style:apply-style-name="ConditionalStyle_5f_6" style:base-cell-address="Probable.F52"/>
    </style:style>
    <style:style style:name="ce116" style:family="table-cell" style:parent-style-name="Default">
      <style:table-cell-properties style:cell-protect="protected" style:print-content="true"/>
      <style:map style:condition="cell-content()&lt;0" style:apply-style-name="ConditionalStyle_5f_17" style:base-cell-address="Probable.H21"/>
    </style:style>
    <style:style style:name="ce117" style:family="table-cell" style:parent-style-name="Default">
      <style:table-cell-properties style:cell-protect="protected" style:print-content="true"/>
      <style:map style:condition="cell-content()&lt;0" style:apply-style-name="ConditionalStyle_5f_11" style:base-cell-address="Probable.H37"/>
    </style:style>
    <style:style style:name="ce118" style:family="table-cell" style:parent-style-name="Default">
      <style:table-cell-properties style:cell-protect="protected" style:print-content="true"/>
      <style:map style:condition="cell-content()&lt;0" style:apply-style-name="ConditionalStyle_5f_5" style:base-cell-address="Probable.H52"/>
    </style:style>
    <style:style style:name="ce119" style:family="table-cell" style:parent-style-name="Default">
      <style:table-cell-properties style:cell-protect="protected" style:print-content="true"/>
      <style:map style:condition="cell-content()&lt;0" style:apply-style-name="ConditionalStyle_5f_16" style:base-cell-address="Probable.M21"/>
    </style:style>
    <style:style style:name="ce120" style:family="table-cell" style:parent-style-name="Default">
      <style:table-cell-properties style:cell-protect="protected" style:print-content="true"/>
      <style:map style:condition="cell-content()&lt;0" style:apply-style-name="ConditionalStyle_5f_10" style:base-cell-address="Probable.M37"/>
    </style:style>
    <style:style style:name="ce121" style:family="table-cell" style:parent-style-name="Default">
      <style:table-cell-properties style:cell-protect="protected" style:print-content="true"/>
      <style:map style:condition="cell-content()&lt;0" style:apply-style-name="ConditionalStyle_5f_15" style:base-cell-address="Probable.O21"/>
    </style:style>
    <style:style style:name="ce122" style:family="table-cell" style:parent-style-name="Default">
      <style:table-cell-properties style:cell-protect="protected" style:print-content="true"/>
      <style:map style:condition="cell-content()&lt;0" style:apply-style-name="ConditionalStyle_5f_9" style:base-cell-address="Probable.O37"/>
    </style:style>
    <style:style style:name="ce123" style:family="table-cell" style:parent-style-name="Default">
      <style:table-cell-properties style:cell-protect="protected" style:print-content="true"/>
      <style:map style:condition="cell-content()&lt;0" style:apply-style-name="ConditionalStyle_5f_3" style:base-cell-address="Probable.U70"/>
    </style:style>
    <style:style style:name="ce124" style:family="table-cell" style:parent-style-name="Default">
      <style:table-cell-properties style:cell-protect="protected" style:print-content="true"/>
      <style:map style:condition="cell-content()&lt;0" style:apply-style-name="ConditionalStyle_5f_1" style:base-cell-address="Probable.U84"/>
    </style:style>
    <style:style style:name="ce125" style:family="table-cell" style:parent-style-name="Default">
      <style:table-cell-properties style:cell-protect="protected" style:print-content="true"/>
      <style:map style:condition="cell-content()&lt;0" style:apply-style-name="ConditionalStyle_5f_14" style:base-cell-address="Probable.V21"/>
    </style:style>
    <style:style style:name="ce126" style:family="table-cell" style:parent-style-name="Default">
      <style:table-cell-properties style:cell-protect="protected" style:print-content="true"/>
      <style:map style:condition="cell-content()&lt;0" style:apply-style-name="ConditionalStyle_5f_8" style:base-cell-address="Probable.V37"/>
    </style:style>
    <style:style style:name="ce127" style:family="table-cell" style:parent-style-name="Default">
      <style:table-cell-properties style:cell-protect="protected" style:print-content="true"/>
      <style:map style:condition="cell-content()&lt;0" style:apply-style-name="ConditionalStyle_5f_13" style:base-cell-address="Probable.X21"/>
    </style:style>
    <style:style style:name="ce128" style:family="table-cell" style:parent-style-name="Default">
      <style:table-cell-properties style:cell-protect="protected" style:print-content="true"/>
      <style:map style:condition="cell-content()&lt;0" style:apply-style-name="ConditionalStyle_5f_7" style:base-cell-address="Probable.X37"/>
    </style:style>
    <style:style style:name="ce129" style:family="table-cell" style:parent-style-name="Default">
      <style:table-cell-properties style:cell-protect="protected" style:print-content="true"/>
      <style:map style:condition="cell-content()&lt;0" style:apply-style-name="ConditionalStyle_5f_2" style:base-cell-address="Probable.AJ70"/>
    </style:style>
    <style:style style:name="ce130" style:family="table-cell" style:parent-style-name="Default">
      <style:table-cell-properties style:cell-protect="protected" style:print-content="true"/>
      <style:map style:condition="cell-content()&lt;0" style:apply-style-name="ConditionalStyle_5f_4" style:base-cell-address="Pesimista.E70"/>
    </style:style>
    <style:style style:name="ce131" style:family="table-cell" style:parent-style-name="Default">
      <style:table-cell-properties style:cell-protect="protected" style:print-content="true"/>
      <style:map style:condition="cell-content()&lt;0" style:apply-style-name="ConditionalStyle_5f_18" style:base-cell-address="Pesimista.F21"/>
    </style:style>
    <style:style style:name="ce132" style:family="table-cell" style:parent-style-name="Default">
      <style:table-cell-properties style:cell-protect="protected" style:print-content="true"/>
      <style:map style:condition="cell-content()&lt;0" style:apply-style-name="ConditionalStyle_5f_12" style:base-cell-address="Pesimista.F37"/>
    </style:style>
    <style:style style:name="ce133" style:family="table-cell" style:parent-style-name="Default">
      <style:table-cell-properties style:cell-protect="protected" style:print-content="true"/>
      <style:map style:condition="cell-content()&lt;0" style:apply-style-name="ConditionalStyle_5f_6" style:base-cell-address="Pesimista.F52"/>
    </style:style>
    <style:style style:name="ce134" style:family="table-cell" style:parent-style-name="Default">
      <style:table-cell-properties style:cell-protect="protected" style:print-content="true"/>
      <style:map style:condition="cell-content()&lt;0" style:apply-style-name="ConditionalStyle_5f_17" style:base-cell-address="Pesimista.H21"/>
    </style:style>
    <style:style style:name="ce135" style:family="table-cell" style:parent-style-name="Default">
      <style:table-cell-properties style:cell-protect="protected" style:print-content="true"/>
      <style:map style:condition="cell-content()&lt;0" style:apply-style-name="ConditionalStyle_5f_11" style:base-cell-address="Pesimista.H37"/>
    </style:style>
    <style:style style:name="ce136" style:family="table-cell" style:parent-style-name="Default">
      <style:table-cell-properties style:cell-protect="protected" style:print-content="true"/>
      <style:map style:condition="cell-content()&lt;0" style:apply-style-name="ConditionalStyle_5f_5" style:base-cell-address="Pesimista.H52"/>
    </style:style>
    <style:style style:name="ce137" style:family="table-cell" style:parent-style-name="Default">
      <style:table-cell-properties style:cell-protect="protected" style:print-content="true"/>
      <style:map style:condition="cell-content()&lt;0" style:apply-style-name="ConditionalStyle_5f_16" style:base-cell-address="Pesimista.M21"/>
    </style:style>
    <style:style style:name="ce138" style:family="table-cell" style:parent-style-name="Default">
      <style:table-cell-properties style:cell-protect="protected" style:print-content="true"/>
      <style:map style:condition="cell-content()&lt;0" style:apply-style-name="ConditionalStyle_5f_10" style:base-cell-address="Pesimista.M37"/>
    </style:style>
    <style:style style:name="ce139" style:family="table-cell" style:parent-style-name="Default">
      <style:table-cell-properties style:cell-protect="protected" style:print-content="true"/>
      <style:map style:condition="cell-content()&lt;0" style:apply-style-name="ConditionalStyle_5f_15" style:base-cell-address="Pesimista.O21"/>
    </style:style>
    <style:style style:name="ce140" style:family="table-cell" style:parent-style-name="Default">
      <style:table-cell-properties style:cell-protect="protected" style:print-content="true"/>
      <style:map style:condition="cell-content()&lt;0" style:apply-style-name="ConditionalStyle_5f_9" style:base-cell-address="Pesimista.O37"/>
    </style:style>
    <style:style style:name="ce141" style:family="table-cell" style:parent-style-name="Default">
      <style:table-cell-properties style:cell-protect="protected" style:print-content="true"/>
      <style:map style:condition="cell-content()&lt;0" style:apply-style-name="ConditionalStyle_5f_3" style:base-cell-address="Pesimista.U70"/>
    </style:style>
    <style:style style:name="ce142" style:family="table-cell" style:parent-style-name="Default">
      <style:table-cell-properties style:cell-protect="protected" style:print-content="true"/>
      <style:map style:condition="cell-content()&lt;0" style:apply-style-name="ConditionalStyle_5f_1" style:base-cell-address="Pesimista.U84"/>
    </style:style>
    <style:style style:name="ce143" style:family="table-cell" style:parent-style-name="Default">
      <style:table-cell-properties style:cell-protect="protected" style:print-content="true"/>
      <style:map style:condition="cell-content()&lt;0" style:apply-style-name="ConditionalStyle_5f_14" style:base-cell-address="Pesimista.V21"/>
    </style:style>
    <style:style style:name="ce144" style:family="table-cell" style:parent-style-name="Default">
      <style:table-cell-properties style:cell-protect="protected" style:print-content="true"/>
      <style:map style:condition="cell-content()&lt;0" style:apply-style-name="ConditionalStyle_5f_8" style:base-cell-address="Pesimista.V37"/>
    </style:style>
    <style:style style:name="ce145" style:family="table-cell" style:parent-style-name="Default">
      <style:table-cell-properties style:cell-protect="protected" style:print-content="true"/>
      <style:map style:condition="cell-content()&lt;0" style:apply-style-name="ConditionalStyle_5f_13" style:base-cell-address="Pesimista.X21"/>
    </style:style>
    <style:style style:name="ce146" style:family="table-cell" style:parent-style-name="Default">
      <style:table-cell-properties style:cell-protect="protected" style:print-content="true"/>
      <style:map style:condition="cell-content()&lt;0" style:apply-style-name="ConditionalStyle_5f_7" style:base-cell-address="Pesimista.X37"/>
    </style:style>
    <style:style style:name="ce147" style:family="table-cell" style:parent-style-name="Default">
      <style:table-cell-properties style:cell-protect="protected" style:print-content="true"/>
      <style:map style:condition="cell-content()&lt;0" style:apply-style-name="ConditionalStyle_5f_2" style:base-cell-address="Pesimista.AJ70"/>
    </style:style>
    <style:style style:name="ce148" style:family="table-cell" style:parent-style-name="Default">
      <style:table-cell-properties style:cell-protect="protected" style:print-content="true"/>
      <style:map style:condition="cell-content()&lt;0" style:apply-style-name="ConditionalStyle_5f_4" style:base-cell-address="Optimista.E70"/>
    </style:style>
    <style:style style:name="ce149" style:family="table-cell" style:parent-style-name="Default">
      <style:table-cell-properties style:cell-protect="protected" style:print-content="true"/>
      <style:map style:condition="cell-content()&lt;0" style:apply-style-name="ConditionalStyle_5f_18" style:base-cell-address="Optimista.F21"/>
    </style:style>
    <style:style style:name="ce150" style:family="table-cell" style:parent-style-name="Default">
      <style:table-cell-properties style:cell-protect="protected" style:print-content="true"/>
      <style:map style:condition="cell-content()&lt;0" style:apply-style-name="ConditionalStyle_5f_12" style:base-cell-address="Optimista.F37"/>
    </style:style>
    <style:style style:name="ce151" style:family="table-cell" style:parent-style-name="Default">
      <style:table-cell-properties style:cell-protect="protected" style:print-content="true"/>
      <style:map style:condition="cell-content()&lt;0" style:apply-style-name="ConditionalStyle_5f_6" style:base-cell-address="Optimista.F52"/>
    </style:style>
    <style:style style:name="ce152" style:family="table-cell" style:parent-style-name="Default">
      <style:table-cell-properties style:cell-protect="protected" style:print-content="true"/>
      <style:map style:condition="cell-content()&lt;0" style:apply-style-name="ConditionalStyle_5f_17" style:base-cell-address="Optimista.H21"/>
    </style:style>
    <style:style style:name="ce153" style:family="table-cell" style:parent-style-name="Default">
      <style:table-cell-properties style:cell-protect="protected" style:print-content="true"/>
      <style:map style:condition="cell-content()&lt;0" style:apply-style-name="ConditionalStyle_5f_11" style:base-cell-address="Optimista.H37"/>
    </style:style>
    <style:style style:name="ce154" style:family="table-cell" style:parent-style-name="Default">
      <style:table-cell-properties style:cell-protect="protected" style:print-content="true"/>
      <style:map style:condition="cell-content()&lt;0" style:apply-style-name="ConditionalStyle_5f_5" style:base-cell-address="Optimista.H52"/>
    </style:style>
    <style:style style:name="ce155" style:family="table-cell" style:parent-style-name="Default">
      <style:table-cell-properties style:cell-protect="protected" style:print-content="true"/>
      <style:map style:condition="cell-content()&lt;0" style:apply-style-name="ConditionalStyle_5f_16" style:base-cell-address="Optimista.M21"/>
    </style:style>
    <style:style style:name="ce156" style:family="table-cell" style:parent-style-name="Default">
      <style:table-cell-properties style:cell-protect="protected" style:print-content="true"/>
      <style:map style:condition="cell-content()&lt;0" style:apply-style-name="ConditionalStyle_5f_10" style:base-cell-address="Optimista.M37"/>
    </style:style>
    <style:style style:name="ce157" style:family="table-cell" style:parent-style-name="Default">
      <style:table-cell-properties style:cell-protect="protected" style:print-content="true"/>
      <style:map style:condition="cell-content()&lt;0" style:apply-style-name="ConditionalStyle_5f_15" style:base-cell-address="Optimista.O21"/>
    </style:style>
    <style:style style:name="ce158" style:family="table-cell" style:parent-style-name="Default">
      <style:table-cell-properties style:cell-protect="protected" style:print-content="true"/>
      <style:map style:condition="cell-content()&lt;0" style:apply-style-name="ConditionalStyle_5f_9" style:base-cell-address="Optimista.O37"/>
    </style:style>
    <style:style style:name="ce159" style:family="table-cell" style:parent-style-name="Default">
      <style:table-cell-properties style:cell-protect="protected" style:print-content="true"/>
      <style:map style:condition="cell-content()&lt;0" style:apply-style-name="ConditionalStyle_5f_3" style:base-cell-address="Optimista.U70"/>
    </style:style>
    <style:style style:name="ce160" style:family="table-cell" style:parent-style-name="Default">
      <style:table-cell-properties style:cell-protect="protected" style:print-content="true"/>
      <style:map style:condition="cell-content()&lt;0" style:apply-style-name="ConditionalStyle_5f_1" style:base-cell-address="Optimista.U84"/>
    </style:style>
    <style:style style:name="ce161" style:family="table-cell" style:parent-style-name="Default">
      <style:table-cell-properties style:cell-protect="protected" style:print-content="true"/>
      <style:map style:condition="cell-content()&lt;0" style:apply-style-name="ConditionalStyle_5f_14" style:base-cell-address="Optimista.V21"/>
    </style:style>
    <style:style style:name="ce162" style:family="table-cell" style:parent-style-name="Default">
      <style:table-cell-properties style:cell-protect="protected" style:print-content="true"/>
      <style:map style:condition="cell-content()&lt;0" style:apply-style-name="ConditionalStyle_5f_8" style:base-cell-address="Optimista.V37"/>
    </style:style>
    <style:style style:name="ce163" style:family="table-cell" style:parent-style-name="Default">
      <style:table-cell-properties style:cell-protect="protected" style:print-content="true"/>
      <style:map style:condition="cell-content()&lt;0" style:apply-style-name="ConditionalStyle_5f_13" style:base-cell-address="Optimista.X21"/>
    </style:style>
    <style:style style:name="ce164" style:family="table-cell" style:parent-style-name="Default">
      <style:table-cell-properties style:cell-protect="protected" style:print-content="true"/>
      <style:map style:condition="cell-content()&lt;0" style:apply-style-name="ConditionalStyle_5f_7" style:base-cell-address="Optimista.X37"/>
    </style:style>
    <style:style style:name="ce165" style:family="table-cell" style:parent-style-name="Default">
      <style:table-cell-properties style:cell-protect="protected" style:print-content="true"/>
      <style:map style:condition="cell-content()&lt;0" style:apply-style-name="ConditionalStyle_5f_2" style:base-cell-address="Optimista.AJ70"/>
    </style:style>
    <style:style style:name="ce166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68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69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7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71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73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7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77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Default" style:data-style-name="N11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79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80" style:family="table-cell" style:parent-style-name="Default" style:data-style-name="N11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 style:data-style-name="N11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82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83" style:family="table-cell" style:parent-style-name="Default" style:data-style-name="N11">
      <style:table-cell-properties style:rotation-align="none"/>
    </style:style>
    <style:style style:name="ce18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Default">
      <style:table-cell-properties fo:background-color="#afaba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86" style:family="table-cell" style:parent-style-name="Default">
      <style:table-cell-properties fo:border-bottom="0.74pt solid #000000" fo:background-color="#afaba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8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1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89" style:family="table-cell" style:parent-style-name="Default">
      <style:table-cell-properties fo:background-color="#afaba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>
      <style:table-cell-properties fo:background-color="#afabab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91" style:family="table-cell" style:parent-style-name="Default" style:data-style-name="N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192" style:family="table-cell" style:parent-style-name="Default" style:data-style-name="N4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93" style:family="table-cell" style:parent-style-name="Default" style:data-style-name="N4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9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96" style:family="table-cell" style:parent-style-name="Default">
      <style:table-cell-properties fo:border-bottom="0.74pt solid #000000" fo:background-color="#afaba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99" style:family="table-cell" style:parent-style-name="Default">
      <style:table-cell-properties fo:background-color="#afaba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200" style:family="table-cell" style:parent-style-name="Default">
      <style:table-cell-properties fo:background-color="#afaba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01" style:family="table-cell" style:parent-style-name="Default" style:data-style-name="N4">
      <style:table-cell-properties fo:background-color="#afaba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20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03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04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0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20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20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208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4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2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2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2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212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2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214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2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216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217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219" style:family="table-cell" style:parent-style-name="Excel_20_Built-in_20_Percent" style:data-style-name="N13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220" style:family="table-cell" style:parent-style-name="Default" style:data-style-name="N10">
      <style:table-cell-properties fo:background-color="#a6a6a6" style:rotation-align="none">
        <loext:background-complex-color loext:theme-type="light1" loext:color-type="theme">
          <loext:transformation loext:type="lummod" loext:value="6500"/>
        </loext:background-complex-color>
      </style:table-cell-properties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222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223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224" style:family="table-cell" style:parent-style-name="Default">
      <style:table-cell-properties fo:background-color="#f8cbad" style:diagonal-bl-tr="none" style:diagonal-tl-br="none" fo:border="0.74pt solid #000000" style:rotation-align="none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225" style:family="table-cell" style:parent-style-name="Default" style:data-style-name="N1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226" style:family="table-cell" style:parent-style-name="Default" style:data-style-name="N13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227" style:family="table-cell" style:parent-style-name="Default" style:data-style-name="N3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4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228" style:family="table-cell" style:parent-style-name="Default" style:data-style-name="N3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229" style:family="table-cell" style:parent-style-name="Default" style:data-style-name="N1">
      <style:table-cell-properties fo:background-color="#f8cbad" style:diagonal-bl-tr="none" style:diagonal-tl-br="none" fo:border="0.74pt solid #000000" style:rotation-align="none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230" style:family="table-cell" style:parent-style-name="Default" style:data-style-name="N138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231" style:family="table-cell" style:parent-style-name="Default" style:data-style-name="N139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232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233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234" style:family="table-cell" style:parent-style-name="Default" style:data-style-name="N1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4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235" style:family="table-cell" style:parent-style-name="Default" style:data-style-name="N136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236" style:family="table-cell" style:parent-style-name="Normal_20_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7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238" style:family="table-cell" style:parent-style-name="Normal_20_2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239" style:family="table-cell" style:parent-style-name="Normal_20_2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240" style:family="table-cell" style:parent-style-name="Normal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1" style:family="table-cell" style:parent-style-name="Normal_20_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242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243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4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5" style:family="table-cell" style:parent-style-name="Normal_20_2">
      <style:table-cell-properties fo:background-color="#8faa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6" style:family="table-cell" style:parent-style-name="Normal_20_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7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8" style:family="table-cell" style:parent-style-name="Normal_20_2" style:data-style-name="N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249" style:family="table-cell" style:parent-style-name="Normal_20_2" style:data-style-name="N1">
      <style:table-cell-properties fo:background-color="#ffff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0" style:family="table-cell" style:parent-style-name="Normal_20_2">
      <style:table-cell-properties style:diagonal-bl-tr="none" style:diagonal-tl-br="none" fo:border="none" style:rotation-align="non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1" style:family="table-cell" style:parent-style-name="Normal_20_2" style:data-style-name="N136">
      <style:table-cell-properties fo:background-color="#ffff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2" style:family="table-cell" style:parent-style-name="Normal_20_2" style:data-style-name="N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3" style:family="table-cell" style:parent-style-name="Normal_20_2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254" style:family="table-cell" style:parent-style-name="Normal_20_2" style:data-style-name="N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255" style:family="table-cell" style:parent-style-name="Normal_20_2" style:data-style-name="N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256" style:family="table-cell" style:parent-style-name="Normal_20_2" style:data-style-name="N1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257" style:family="table-cell" style:parent-style-name="Normal_20_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8" style:family="table-cell" style:parent-style-name="Normal_20_2" style:data-style-name="N1">
      <style:table-cell-properties fo:background-color="#8faadc" style:diagonal-bl-tr="none" style:diagonal-tl-br="none" fo:border="0.74pt solid #000000" style:rotation-align="none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9" style:family="table-cell" style:parent-style-name="Normal_20_2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0" style:family="table-cell" style:parent-style-name="Normal_20_2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1" style:family="table-cell" style:parent-style-name="Normal_20_2" style:data-style-name="N1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262" style:family="table-cell" style:parent-style-name="Normal_20_2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3" style:family="table-cell" style:parent-style-name="Normal_20_2_20_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64" style:family="table-cell" style:parent-style-name="Normal_20_2_20_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65" style:family="table-cell" style:parent-style-name="Normal_20_2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266" style:family="table-cell" style:parent-style-name="Normal_20_2_20_2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267" style:family="table-cell" style:parent-style-name="Normal_20_2_20_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68" style:family="table-cell" style:parent-style-name="Normal_20_2_20_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269" style:family="table-cell" style:parent-style-name="Normal_20_2_20_2" style:data-style-name="N3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70" style:family="table-cell" style:parent-style-name="Normal_20_2_20_2" style:data-style-name="N3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271" style:family="table-cell" style:parent-style-name="Normal_20_2_20_2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272" style:family="table-cell" style:parent-style-name="Normal_20_2_20_2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273" style:family="table-cell" style:parent-style-name="Normal_20_2_20_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74" style:family="table-cell" style:parent-style-name="Normal_20_2_20_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5" style:family="table-cell" style:parent-style-name="Normal_20_2_20_2">
      <style:table-cell-properties fo:background-color="#d8d8d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276" style:family="table-cell" style:parent-style-name="Normal_20_2_20_2" style:data-style-name="N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77" style:family="table-cell" style:parent-style-name="Normal_20_2_20_2" style:data-style-name="N4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Normal_20_2_20_2" style:data-style-name="N4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279" style:family="table-cell" style:parent-style-name="Normal_20_2_20_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80" style:family="table-cell" style:parent-style-name="Normal_20_2_20_2" style:data-style-name="N3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81" style:family="table-cell" style:parent-style-name="Normal_20_2_20_2" style:data-style-name="N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Normal_20_2_20_2" style:data-style-name="N4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Normal_20_2_20_2" style:data-style-name="N3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84" style:family="table-cell" style:parent-style-name="Normal_20_3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5" style:family="table-cell" style:parent-style-name="Normal_20_3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6" style:family="table-cell" style:parent-style-name="Normal_20_3">
      <style:table-cell-properties fo:background-color="#5b9bd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7" style:family="table-cell" style:parent-style-name="Normal_20_3">
      <style:table-cell-properties fo:border-bottom="0.74pt solid #000000" fo:background-color="#5b9bd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8" style:family="table-cell" style:parent-style-name="Normal_20_3" style:data-style-name="N12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9" style:family="table-cell" style:parent-style-name="Normal_20_3" style:data-style-name="N12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0" style:family="table-cell" style:parent-style-name="Normal_20_3" style:data-style-name="N12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1" style:family="table-cell" style:parent-style-name="Normal_20_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2" style:family="table-cell" style:parent-style-name="Normal_20_3" style:data-style-name="N36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3" style:family="table-cell" style:parent-style-name="Normal_20_3" style:data-style-name="N4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4" style:family="table-cell" style:parent-style-name="Normal_20_3" style:data-style-name="N4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5" style:family="table-cell" style:parent-style-name="Normal_20_3" style:data-style-name="N4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6" style:family="table-cell" style:parent-style-name="Normal_20_3">
      <style:table-cell-properties fo:background-color="#e2f0d9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7" style:family="table-cell" style:parent-style-name="Normal_20_3">
      <style:table-cell-properties fo:background-color="#5b9bd5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8" style:family="table-cell" style:parent-style-name="Normal_20_3" style:data-style-name="N10">
      <style:table-cell-properties fo:background-color="#5b9bd5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9" style:family="table-cell" style:parent-style-name="Normal_20_3" style:data-style-name="N2">
      <style:table-cell-properties fo:background-color="#e2f0d9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0" style:family="table-cell" style:parent-style-name="Normal_20_3" style:data-style-name="N11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1" style:family="table-cell" style:parent-style-name="Normal_20_3" style:data-style-name="N11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2" style:family="table-cell" style:parent-style-name="Normal_20_3" style:data-style-name="N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3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04" style:family="table-cell" style:parent-style-name="Normal_20_3" style:data-style-name="N36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05" style:family="table-cell" style:parent-style-name="Normal_20_3" style:data-style-name="N2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06" style:family="table-cell" style:parent-style-name="Normal_20_3" style:data-style-name="N1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7" style:family="table-cell" style:parent-style-name="Normal_20_2_20_2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08" style:family="table-cell" style:parent-style-name="Normal_20_2_20_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09" style:family="table-cell" style:parent-style-name="Normal_20_2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310" style:family="table-cell" style:parent-style-name="Normal_20_2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11" style:family="table-cell" style:parent-style-name="Normal_20_2_20_2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312" style:family="table-cell" style:parent-style-name="Normal_20_2_20_2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13" style:family="table-cell" style:parent-style-name="Normal_20_2_20_2" style:data-style-name="N3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314" style:family="table-cell" style:parent-style-name="Normal_20_2_20_2" style:data-style-name="N3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15" style:family="table-cell" style:parent-style-name="Normal_20_2_20_2" style:data-style-name="N3">
      <style:table-cell-properties fo:background-color="#d8d8d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316" style:family="table-cell" style:parent-style-name="Normal_20_2_20_2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317" style:family="table-cell" style:parent-style-name="Normal_20_2_20_2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318" style:family="table-cell" style:parent-style-name="Normal_20_2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19" style:family="table-cell" style:parent-style-name="Normal_20_2_20_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20" style:family="table-cell" style:parent-style-name="Normal_20_2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21" style:family="table-cell" style:parent-style-name="Normal_20_2_20_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22" style:family="table-cell" style:parent-style-name="Normal_20_2_20_2" style:data-style-name="N4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23" style:family="table-cell" style:parent-style-name="Normal_20_2_20_2" style:data-style-name="N4">
      <style:table-cell-properties fo:background-color="#d8d8d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324" style:family="table-cell" style:parent-style-name="Normal_20_2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25" style:family="table-cell" style:parent-style-name="Normal_20_2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326" style:family="table-cell" style:parent-style-name="Normal_20_2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27" style:family="table-cell" style:parent-style-name="Normal_20_2_20_2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328" style:family="table-cell" style:parent-style-name="Normal_20_2_20_2" style:data-style-name="N127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29" style:family="table-cell" style:parent-style-name="Normal_20_2_20_2" style:data-style-name="N3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30" style:family="table-cell" style:parent-style-name="Normal_20_2_20_2">
      <style:table-cell-properties fo:background-color="#d8d8d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331" style:family="table-cell" style:parent-style-name="Normal_20_2_20_2" style:data-style-name="N4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332" style:family="table-cell" style:parent-style-name="Normal_20_2_20_2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333" style:family="table-cell" style:parent-style-name="Normal_20_2_20_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34" style:family="table-cell" style:parent-style-name="Normal_20_2_20_2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35" style:family="table-cell" style:parent-style-name="Normal_20_2_20_2" style:data-style-name="N137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336" style:family="table-cell" style:parent-style-name="Normal_20_2_20_2" style:data-style-name="N1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37" style:family="table-cell" style:parent-style-name="Normal_20_2_20_2" style:data-style-name="N1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338" style:family="table-cell" style:parent-style-name="Normal_20_2_20_2" style:data-style-name="N1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39" style:family="table-cell" style:parent-style-name="Normal_20_2_20_2" style:data-style-name="N137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340" style:family="table-cell" style:parent-style-name="Normal_20_2_20_2" style:data-style-name="N1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41" style:family="table-cell" style:parent-style-name="Default">
      <style:table-cell-properties fo:background-color="#8faa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342" style:family="table-cell" style:parent-style-name="Default">
      <style:table-cell-properties fo:background-color="#8faadc" style:diagonal-bl-tr="none" style:diagonal-tl-br="none" fo:border="0.74pt solid #000000" style:rotation-align="none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34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344" style:family="table-cell" style:parent-style-name="Default">
      <style:table-cell-properties fo:background-color="#8faadc" style:diagonal-bl-tr="none" style:diagonal-tl-br="none" fo:border="0.74pt solid #000000" style:rotation-align="none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45" style:family="table-cell" style:parent-style-name="Default" style:data-style-name="N4">
      <style:table-cell-properties fo:background-color="#8faadc" style:diagonal-bl-tr="none" style:diagonal-tl-br="none" fo:border="0.74pt solid #000000" style:rotation-align="none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346" style:family="table-cell" style:parent-style-name="Default" style:data-style-name="N4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347" style:family="table-cell" style:parent-style-name="Default">
      <style:table-cell-properties fo:background-color="#8faa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48" style:family="table-cell" style:parent-style-name="Default" style:data-style-name="N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49" style:family="table-cell" style:parent-style-name="Default" style:data-style-name="N2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50" style:family="table-cell" style:parent-style-name="Default" style:data-style-name="N2">
      <style:table-cell-properties fo:background-color="#ffc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51" style:family="table-cell" style:parent-style-name="Normal_20_2_20_2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52" style:family="table-cell" style:parent-style-name="Normal_20_2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353" style:family="table-cell" style:parent-style-name="Normal_20_2_20_2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354" style:family="table-cell" style:parent-style-name="Normal_20_2_20_2">
      <style:table-cell-properties fo:background-color="#8faa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355" style:family="table-cell" style:parent-style-name="Normal_20_2_20_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356" style:family="table-cell" style:parent-style-name="Normal_20_2_20_2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357" style:family="table-cell" style:parent-style-name="Normal_20_2_20_2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358" style:family="table-cell" style:parent-style-name="Normal_20_2_20_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359" style:family="table-cell" style:parent-style-name="Normal_20_2_20_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0" style:family="table-cell" style:parent-style-name="Normal_20_2_20_2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361" style:family="table-cell" style:parent-style-name="Normal_20_2_20_2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362" style:family="table-cell" style:parent-style-name="Normal_20_2_20_2" style:data-style-name="N13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63" style:family="table-cell" style:parent-style-name="Normal_20_2_20_2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64" style:family="table-cell" style:parent-style-name="Normal_20_2_20_2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365" style:family="table-cell" style:parent-style-name="Normal_20_2_20_2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366" style:family="table-cell" style:parent-style-name="Normal_20_2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367" style:family="table-cell" style:parent-style-name="Normal_20_2_20_2" style:data-style-name="N136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368" style:family="table-cell" style:parent-style-name="Normal_20_2_20_2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369" style:family="table-cell" style:parent-style-name="Normal_20_2_20_2" style:data-style-name="N13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370" style:family="table-cell" style:parent-style-name="Normal_20_2_20_2" style:data-style-name="N1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371" style:family="table-cell" style:parent-style-name="Normal_20_2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2" style:family="table-cell" style:parent-style-name="Normal_20_2_20_2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373" style:family="table-cell" style:parent-style-name="Normal_20_2_20_2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374" style:family="table-cell" style:parent-style-name="Normal_20_2_20_2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5" style:family="table-cell" style:parent-style-name="Normal_20_2_20_2" style:data-style-name="N2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376" style:family="table-cell" style:parent-style-name="Normal_20_2_20_2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377" style:family="table-cell" style:parent-style-name="Normal_20_2_20_2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378" style:family="table-cell" style:parent-style-name="Normal_20_2_20_2" style:data-style-name="N1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379" style:family="table-cell" style:parent-style-name="Normal_20_2_20_2" style:data-style-name="N1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380" style:family="table-cell" style:parent-style-name="Normal_20_2_20_2" style:data-style-name="N135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381" style:family="table-cell" style:parent-style-name="Normal_20_2_20_2" style:data-style-name="N135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382" style:family="table-cell" style:parent-style-name="Normal_20_2_20_2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83" style:family="table-cell" style:parent-style-name="Normal_20_2_20_2" style:data-style-name="N134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384" style:family="table-cell" style:parent-style-name="Normal_20_2_20_2" style:data-style-name="N134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385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6" style:family="table-cell" style:parent-style-name="Normal_20_2_20_2">
      <style:table-cell-properties fo:background-color="#a6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6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7" style:family="table-cell" style:parent-style-name="Normal_20_2_20_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8" style:family="table-cell" style:parent-style-name="Normal_20_2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9" style:family="table-cell" style:parent-style-name="Normal_20_2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0" style:family="table-cell" style:parent-style-name="Porcentaje_20_2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91" style:family="table-cell" style:parent-style-name="Normal_20_2_20_2" style:data-style-name="N4">
      <style:table-cell-properties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2" style:family="table-cell" style:parent-style-name="Normal_20_2_20_2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3" style:family="table-cell" style:parent-style-name="Normal_20_2_20_2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4" style:family="table-cell" style:parent-style-name="Normal_20_2_20_2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5" style:family="table-cell" style:parent-style-name="Normal_20_2_20_2" style:data-style-name="N11">
      <style:table-cell-properties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6" style:family="table-cell" style:parent-style-name="Normal_20_2_20_2" style:data-style-name="N10">
      <style:table-cell-properties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7" style:family="table-cell" style:parent-style-name="Porcentaje_20_2" style:data-style-name="N13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98" style:family="table-cell" style:parent-style-name="Normal_20_2_20_2">
      <style:table-cell-properties fo:border-bottom="0.74pt solid #000000" fo:background-color="#a6a6a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6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9" style:family="table-cell" style:parent-style-name="Normal_20_2_20_2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0" style:family="table-cell" style:parent-style-name="Normal_20_2_20_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1" style:family="table-cell" style:parent-style-name="Normal_20_2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02" style:family="table-cell" style:parent-style-name="Normal_20_2_20_2" style:data-style-name="N4">
      <style:table-cell-properties fo:background-color="#a6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6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3" style:family="table-cell" style:parent-style-name="Normal_20_2_20_2">
      <style:table-cell-properties fo:border-bottom="0.74pt solid #000000" fo:background-color="#a6a6a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6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4" style:family="table-cell" style:parent-style-name="Normal_20_2_20_2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hyperlink" loext:color-type="theme"/>
      </style:text-properties>
    </style:style>
    <style:style style:name="ce40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07" style:family="table-cell" style:parent-style-name="Excel_20_Built-in_20_Percent" style:data-style-name="N13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0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0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10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11" style:family="table-cell" style:parent-style-name="Default" style:data-style-name="N0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12" style:family="table-cell" style:parent-style-name="Default" style:data-style-name="N135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13" style:family="table-cell" style:parent-style-name="Excel_20_Built-in_20_Percent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14" style:family="table-cell" style:parent-style-name="Excel_20_Built-in_20_Percent" style:data-style-name="N11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1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16" style:family="table-cell" style:parent-style-name="Excel_20_Built-in_20_Percent" style:data-style-name="N13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17" style:family="table-cell" style:parent-style-name="Default" style:data-style-name="N2">
      <style:table-cell-properties fo:background-color="#ffff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1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419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20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421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422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423" style:family="table-cell" style:parent-style-name="Default" style:data-style-name="N3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24" style:family="table-cell" style:parent-style-name="Default" style:data-style-name="N3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425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426" style:family="table-cell" style:parent-style-name="Default" style:data-style-name="N3">
      <style:table-cell-properties fo:border-bottom="0.74pt solid #000000" fo:background-color="#ffffff" style:diagonal-bl-tr="none" style:diagonal-tl-br="none" fo:border-left="none" fo:border-right="none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427" style:family="table-cell" style:parent-style-name="Default" style:data-style-name="N133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428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29" style:family="table-cell" style:parent-style-name="Default">
      <style:table-cell-properties fo:border-bottom="none" fo:background-color="#b4c7e7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430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43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4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33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34" style:family="table-cell" style:parent-style-name="Default">
      <style:table-cell-properties fo:border-bottom="none" fo:background-color="#b4c7e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435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36" style:family="table-cell" style:parent-style-name="Excel_20_Built-in_20_Percent" style:data-style-name="N1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37" style:family="table-cell" style:parent-style-name="Excel_20_Built-in_20_Percent" style:data-style-name="N1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4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39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44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441" style:family="table-cell" style:parent-style-name="Excel_20_Built-in_20_Percent" style:data-style-name="N135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42" style:family="table-cell" style:parent-style-name="Default" style:data-style-name="N14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43" style:family="table-cell" style:parent-style-name="Default" style:data-style-name="N144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444" style:family="table-cell" style:parent-style-name="Default" style:data-style-name="N3">
      <style:table-cell-properties fo:background-color="transparent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45" style:family="table-cell" style:parent-style-name="Default">
      <style:table-cell-properties fo:border-bottom="none" fo:background-color="#b4c7e7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446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47" style:family="table-cell" style:parent-style-name="Default" style:data-style-name="N2">
      <style:table-cell-properties fo:background-color="transparent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4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449" style:family="table-cell" style:parent-style-name="Default">
      <style:table-cell-properties fo:background-color="#00b0f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50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51" style:family="table-cell" style:parent-style-name="Excel_20_Built-in_20_Percent" style:data-style-name="N11">
      <style:table-cell-properties fo:background-color="#00b0f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overflow-behavior="clip" loext:decorative="false"/>
      <style:paragraph-properties style:writing-mode="lr-tb" fo:margin-left="0cm" fo:margin-right="0cm" fo:margin-top="0cm" fo:margin-bottom="0cm" fo:line-height="100%" fo:text-align="start" fo:text-indent="0cm"/>
      <style:text-properties fo:font-size="18pt"/>
    </style:style>
    <style:style style:name="ta_extref" style:family="table">
      <style:table-properties table:display="false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Cambria Math'" style:font-family-generic="roman" style:font-pitch="variable" fo:font-size="11pt" fo:letter-spacing="normal" fo:language="es" fo:country="E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men del escenario 2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4"/>
        <table:table-column table:style-name="co2" table:default-cell-style-name="ce4"/>
        <table:table-column-group>
          <table:table-column table:style-name="co3" table:number-columns-repeated="3" table:default-cell-style-name="ce11"/>
        </table:table-column-group>
        <table:table-column table:style-name="co1" table:number-columns-repeated="16378" table:default-cell-style-name="Default"/>
        <table:table-row table:style-name="ro1">
          <table:table-cell/>
          <table:table-cell table:style-name="Default" table:number-columns-repeated="5"/>
          <table:table-cell table:number-columns-repeated="16378"/>
        </table:table-row>
        <table:table-row table:style-name="ro1">
          <table:table-cell/>
          <table:table-cell table:style-name="ce2" office:value-type="string" calcext:value-type="string">
            <text:p>Resumen del escenario</text:p>
          </table:table-cell>
          <table:table-cell table:style-name="ce2"/>
          <table:table-cell table:style-name="ce7" table:number-columns-repeated="3"/>
          <table:table-cell table:number-columns-repeated="16378"/>
        </table:table-row>
        <table:table-row table:style-name="ro1">
          <table:table-cell/>
          <table:table-cell table:style-name="ce3" table:number-columns-repeated="2"/>
          <table:table-cell table:style-name="ce8" office:value-type="string" calcext:value-type="string">
            <text:p>Probable</text:p>
          </table:table-cell>
          <table:table-cell table:style-name="ce8" office:value-type="string" calcext:value-type="string">
            <text:p>Pesimista</text:p>
          </table:table-cell>
          <table:table-cell table:style-name="ce8" office:value-type="string" calcext:value-type="string">
            <text:p>Optimista</text:p>
          </table:table-cell>
          <table:table-cell table:number-columns-repeated="16378"/>
        </table:table-row>
        <table:table-row-group>
          <table:table-row table:style-name="ro2" table:visibility="collapse">
            <table:table-cell table:number-columns-repeated="3"/>
            <table:table-cell table:style-name="ce9" office:value-type="string" calcext:value-type="string">
              <text:p>Creado por ASUS el 23/02/2021</text:p>
              <text:p>Modificado por ASUS el 23/02/2021</text:p>
              <text:p>Modificado por ASUS el 25/02/2021</text:p>
            </table:table-cell>
            <table:table-cell table:style-name="ce9" office:value-type="string" calcext:value-type="string">
              <text:p>Creado por ASUS el 23/02/2021</text:p>
              <text:p>Modificado por ASUS el 23/02/2021</text:p>
              <text:p>Modificado por ASUS el 25/02/2021</text:p>
            </table:table-cell>
            <table:table-cell table:style-name="ce9" office:value-type="string" calcext:value-type="string">
              <text:p>Creado por ASUS el 23/02/2021</text:p>
              <text:p>Modificado por ASUS el 25/02/2021</text:p>
            </table:table-cell>
            <table:table-cell table:number-columns-repeated="16378"/>
          </table:table-row>
        </table:table-row-group>
        <table:table-row table:style-name="ro1">
          <table:table-cell/>
          <table:table-cell table:style-name="ce5" office:value-type="string" calcext:value-type="string">
            <text:p>Celdas cambiantes:</text:p>
          </table:table-cell>
          <table:table-cell table:style-name="ce5"/>
          <table:table-cell table:style-name="ce10" table:number-columns-repeated="3"/>
          <table:table-cell table:number-columns-repeated="16378"/>
        </table:table-row>
        <table:table-row-group>
          <table:table-row table:style-name="ro1">
            <table:table-cell/>
            <table:table-cell office:value-type="string" calcext:value-type="string">
              <text:p>Valor de venta DB5</text:p>
            </table:table-cell>
            <table:table-cell/>
            <table:table-cell office:value-type="percentage" office:value="0" calcext:value-type="percentage">
              <text:p>0 %</text:p>
            </table:table-cell>
            <table:table-cell office:value-type="percentage" office:value="-0.1" calcext:value-type="percentage">
              <text:p>-10 %</text:p>
            </table:table-cell>
            <table:table-cell office:value-type="percentage" office:value="0.15" calcext:value-type="percentage">
              <text:p>15 %</text:p>
            </table:table-cell>
            <table:table-cell table:number-columns-repeated="16378"/>
          </table:table-row>
          <table:table-row table:style-name="ro1">
            <table:table-cell/>
            <table:table-cell office:value-type="string" calcext:value-type="string">
              <text:p>Valor de venta G90</text:p>
            </table:table-cell>
            <table:table-cell/>
            <table:table-cell office:value-type="percentage" office:value="0" calcext:value-type="percentage">
              <text:p>0 %</text:p>
            </table:table-cell>
            <table:table-cell office:value-type="percentage" office:value="-0.12" calcext:value-type="percentage">
              <text:p>-12 %</text:p>
            </table:table-cell>
            <table:table-cell office:value-type="percentage" office:value="0.18" calcext:value-type="percentage">
              <text:p>18 %</text:p>
            </table:table-cell>
            <table:table-cell table:number-columns-repeated="16378"/>
          </table:table-row>
          <table:table-row table:style-name="ro1">
            <table:table-cell/>
            <table:table-cell office:value-type="string" calcext:value-type="string">
              <text:p>Valor de venta G95</text:p>
            </table:table-cell>
            <table:table-cell/>
            <table:table-cell office:value-type="percentage" office:value="0" calcext:value-type="percentage">
              <text:p>0 %</text:p>
            </table:table-cell>
            <table:table-cell office:value-type="percentage" office:value="-0.2" calcext:value-type="percentage">
              <text:p>-20 %</text:p>
            </table:table-cell>
            <table:table-cell office:value-type="percentage" office:value="0.2" calcext:value-type="percentage">
              <text:p>20 %</text:p>
            </table:table-cell>
            <table:table-cell table:number-columns-repeated="16378"/>
          </table:table-row>
          <table:table-row table:style-name="ro1">
            <table:table-cell/>
            <table:table-cell office:value-type="string" calcext:value-type="string">
              <text:p>Valor de compra DB5</text:p>
            </table:table-cell>
            <table:table-cell/>
            <table:table-cell office:value-type="percentage" office:value="0" calcext:value-type="percentage">
              <text:p>0 %</text:p>
            </table:table-cell>
            <table:table-cell office:value-type="percentage" office:value="0.15" calcext:value-type="percentage">
              <text:p>15 %</text:p>
            </table:table-cell>
            <table:table-cell office:value-type="percentage" office:value="-0.1" calcext:value-type="percentage">
              <text:p>-10 %</text:p>
            </table:table-cell>
            <table:table-cell table:number-columns-repeated="16378"/>
          </table:table-row>
          <table:table-row table:style-name="ro1">
            <table:table-cell/>
            <table:table-cell office:value-type="string" calcext:value-type="string">
              <text:p>Valor de compra G90</text:p>
            </table:table-cell>
            <table:table-cell/>
            <table:table-cell office:value-type="percentage" office:value="0" calcext:value-type="percentage">
              <text:p>0 %</text:p>
            </table:table-cell>
            <table:table-cell office:value-type="percentage" office:value="0.18" calcext:value-type="percentage">
              <text:p>18 %</text:p>
            </table:table-cell>
            <table:table-cell office:value-type="percentage" office:value="-0.12" calcext:value-type="percentage">
              <text:p>-12 %</text:p>
            </table:table-cell>
            <table:table-cell table:number-columns-repeated="16378"/>
          </table:table-row>
          <table:table-row table:style-name="ro1">
            <table:table-cell/>
            <table:table-cell office:value-type="string" calcext:value-type="string">
              <text:p>Valor de compra G95</text:p>
            </table:table-cell>
            <table:table-cell/>
            <table:table-cell office:value-type="percentage" office:value="0" calcext:value-type="percentage">
              <text:p>0 %</text:p>
            </table:table-cell>
            <table:table-cell office:value-type="percentage" office:value="0.2" calcext:value-type="percentage">
              <text:p>20 %</text:p>
            </table:table-cell>
            <table:table-cell office:value-type="percentage" office:value="-0.18" calcext:value-type="percentage">
              <text:p>-18 %</text:p>
            </table:table-cell>
            <table:table-cell table:number-columns-repeated="16378"/>
          </table:table-row>
        </table:table-row-group>
        <table:table-row table:style-name="ro1">
          <table:table-cell/>
          <table:table-cell table:style-name="ce5" office:value-type="string" calcext:value-type="string">
            <text:p>Celdas de resultado:</text:p>
          </table:table-cell>
          <table:table-cell table:style-name="ce5"/>
          <table:table-cell table:style-name="ce10" table:number-columns-repeated="3"/>
          <table:table-cell table:number-columns-repeated="16378"/>
        </table:table-row>
        <table:table-row-group>
          <table:table-row table:style-name="ro1">
            <table:table-cell/>
            <table:table-cell office:value-type="string" calcext:value-type="string">
              <text:p>VANE</text:p>
            </table:table-cell>
            <table:table-cell/>
            <table:table-cell table:style-name="ce12" office:value-type="float" office:value="254319.409512592" calcext:value-type="float">
              <text:p>254,319</text:p>
            </table:table-cell>
            <table:table-cell table:style-name="ce12" office:value-type="float" office:value="-809266.604871013" calcext:value-type="float">
              <text:p>-809,267</text:p>
            </table:table-cell>
            <table:table-cell table:style-name="ce12" office:value-type="float" office:value="1364605.49902695" calcext:value-type="float">
              <text:p>1,364,605</text:p>
            </table:table-cell>
            <table:table-cell table:number-columns-repeated="16378"/>
          </table:table-row>
          <table:table-row table:style-name="ro1">
            <table:table-cell/>
            <table:table-cell office:value-type="string" calcext:value-type="string">
              <text:p>TIRE</text:p>
            </table:table-cell>
            <table:table-cell/>
            <table:table-cell table:style-name="ce13" office:value-type="percentage" office:value="0.223931335895598" calcext:value-type="percentage">
              <text:p>22.39 %</text:p>
            </table:table-cell>
            <table:table-cell table:style-name="ce13" office:value-type="percentage" office:value="-0.0595472701765842" calcext:value-type="percentage">
              <text:p>-5.95 %</text:p>
            </table:table-cell>
            <table:table-cell table:style-name="ce13" office:value-type="percentage" office:value="0.490472929534141" calcext:value-type="percentage">
              <text:p>49.05 %</text:p>
            </table:table-cell>
            <table:table-cell table:number-columns-repeated="16378"/>
          </table:table-row>
          <table:table-row table:style-name="ro1">
            <table:table-cell/>
            <table:table-cell office:value-type="string" calcext:value-type="string">
              <text:p>VANF</text:p>
            </table:table-cell>
            <table:table-cell/>
            <table:table-cell table:style-name="ce14" office:value-type="float" office:value="296561.899747891" calcext:value-type="float">
              <text:p>S/ 296,561.90</text:p>
            </table:table-cell>
            <table:table-cell table:style-name="ce14" office:value-type="float" office:value="-767024.114635714" calcext:value-type="float">
              <text:p>-S/ 767,024.11</text:p>
            </table:table-cell>
            <table:table-cell table:style-name="ce14" office:value-type="float" office:value="1406847.98926225" calcext:value-type="float">
              <text:p>S/ 1,406,847.99</text:p>
            </table:table-cell>
            <table:table-cell table:number-columns-repeated="16378"/>
          </table:table-row>
          <table:table-row table:style-name="ro1">
            <table:table-cell/>
            <table:table-cell table:style-name="ce6" office:value-type="string" calcext:value-type="string">
              <text:p>TIRF</text:p>
            </table:table-cell>
            <table:table-cell table:style-name="ce6"/>
            <table:table-cell table:style-name="ce15" office:value-type="percentage" office:value="0.233470246839537" calcext:value-type="percentage">
              <text:p>23.35 %</text:p>
            </table:table-cell>
            <table:table-cell table:style-name="ce15" office:value-type="percentage" office:value="-0.0520416262293266" calcext:value-type="percentage">
              <text:p>-5.20 %</text:p>
            </table:table-cell>
            <table:table-cell table:style-name="ce15" office:value-type="percentage" office:value="0.501185780608193" calcext:value-type="percentage">
              <text:p>50.12 %</text:p>
            </table:table-cell>
            <table:table-cell table:number-columns-repeated="16378"/>
          </table:table-row>
        </table:table-row-group>
        <table:table-row table:style-name="ro1">
          <table:table-cell/>
          <table:table-cell table:style-name="Default" office:value-type="string" calcext:value-type="string">
            <text:p>Notas: La columna de valores actuales representa los valores de las celdas cambiantes</text:p>
          </table:table-cell>
          <table:table-cell table:style-name="Default" table:number-columns-repeated="4"/>
          <table:table-cell table:number-columns-repeated="16378"/>
        </table:table-row>
        <table:table-row table:style-name="ro1">
          <table:table-cell/>
          <table:table-cell table:style-name="Default" office:value-type="string" calcext:value-type="string">
            <text:p>en el momento en que se creó el Informe resumen de escenario. Las celdas cambiantes de</text:p>
          </table:table-cell>
          <table:table-cell table:style-name="Default" table:number-columns-repeated="4"/>
          <table:table-cell table:number-columns-repeated="16378"/>
        </table:table-row>
        <table:table-row table:style-name="ro1">
          <table:table-cell/>
          <table:table-cell table:style-name="Default" office:value-type="string" calcext:value-type="string">
            <text:p>cada escenario se muestran en gris.</text:p>
          </table:table-cell>
          <table:table-cell table:style-name="Default" table:number-columns-repeated="4"/>
          <table:table-cell table:number-columns-repeated="16378"/>
        </table:table-row>
      </table:table>
      <table:table table:name="Análisis de sensibilidad" table:style-name="ta2"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number-columns-repeated="11" table:default-cell-style-name="ce16"/>
        <table:table-column table:style-name="co9" table:default-cell-style-name="ce16"/>
        <table:table-column table:style-name="co10" table:default-cell-style-name="ce16"/>
        <table:table-column table:style-name="co5" table:default-cell-style-name="ce16"/>
        <table:table-column table:style-name="co11" table:default-cell-style-name="ce16"/>
        <table:table-column table:style-name="co4" table:default-cell-style-name="ce16"/>
        <table:table-column table:style-name="co12" table:number-columns-repeated="3" table:default-cell-style-name="ce16"/>
        <table:table-column table:style-name="co13" table:default-cell-style-name="ce16"/>
        <table:table-column table:style-name="co12" table:number-columns-repeated="7" table:default-cell-style-name="ce16"/>
        <table:table-column table:style-name="co4" table:default-cell-style-name="ce16"/>
        <table:table-column table:style-name="co14" table:default-cell-style-name="ce16"/>
        <table:table-column table:style-name="co15" table:default-cell-style-name="ce16"/>
        <table:table-column table:style-name="co4" table:number-columns-repeated="16350" table:default-cell-style-name="ce16"/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20" office:value-type="string" calcext:value-type="string" table:number-columns-spanned="7" table:number-rows-spanned="1">
            <text:p>Análisis de punto muerto o punto crítico</text:p>
          </table:table-cell>
          <table:covered-table-cell table:number-columns-repeated="6" table:style-name="ce33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21" office:value-type="string" calcext:value-type="string">
            <text:p>Identificación de variables sensibles</text:p>
          </table:table-cell>
          <table:table-cell table:style-name="ce21"/>
          <table:table-cell table:number-columns-repeated="16379"/>
        </table:table-row>
        <table:table-row table:style-name="ro3">
          <table:table-cell table:number-columns-repeated="3"/>
          <table:table-cell table:style-name="ce22" office:value-type="string" calcext:value-type="string">
            <text:p>Variables</text:p>
          </table:table-cell>
          <table:table-cell table:style-name="ce34"/>
          <table:table-cell table:style-name="ce42"/>
          <table:table-cell table:style-name="ce52" office:value-type="string" calcext:value-type="string">
            <text:p>Variación porcentual</text:p>
          </table:table-cell>
          <table:table-cell table:style-name="ce52" office:value-type="string" calcext:value-type="string">
            <text:p>Valores con cambio</text:p>
          </table:table-cell>
          <table:table-cell table:style-name="ce52" office:value-type="string" calcext:value-type="string">
            <text:p>Valores actuales</text:p>
          </table:table-cell>
          <table:table-cell table:style-name="ce52" office:value-type="string" calcext:value-type="string">
            <text:p>Variación absoluta</text:p>
          </table:table-cell>
          <table:table-cell/>
          <table:table-cell table:style-name="ce42" office:value-type="string" calcext:value-type="string">
            <text:p>VANE</text:p>
          </table:table-cell>
          <table:table-cell table:style-name="ce42" office:value-type="string" calcext:value-type="string">
            <text:p>TIRE</text:p>
          </table:table-cell>
          <table:table-cell table:style-name="ce42" office:value-type="string" calcext:value-type="string">
            <text:p>VANF</text:p>
          </table:table-cell>
          <table:table-cell table:style-name="ce42" office:value-type="string" calcext:value-type="string">
            <text:p>TIRF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23" office:value-type="string" calcext:value-type="string">
            <text:p>Valor de venta DB5</text:p>
          </table:table-cell>
          <table:table-cell table:style-name="ce23"/>
          <table:table-cell table:style-name="ce43" office:value-type="percentage" office:value="0" calcext:value-type="percentage">
            <text:p>0 %</text:p>
          </table:table-cell>
          <table:table-cell table:style-name="ce53" office:value-type="percentage" office:value="-0.115902637001483" calcext:value-type="percentage">
            <text:p>-11.59 %</text:p>
          </table:table-cell>
          <table:table-cell table:style-name="ce58" table:formula="of:=+[$Resumen.C4]*(1+[$'Análisis de sensibilidad'.G6])" office:value-type="float" office:value="9.73256334351757" calcext:value-type="float">
            <text:p>9.7326</text:p>
          </table:table-cell>
          <table:table-cell table:style-name="ce67" table:formula="of:=+[$Resumen.C4]" office:value-type="float" office:value="11.0084745762712" calcext:value-type="float">
            <text:p>11.01</text:p>
          </table:table-cell>
          <table:table-cell table:style-name="ce67" table:formula="of:=+[.H6]-[.I6]" office:value-type="float" office:value="-1.27591123275361" calcext:value-type="float">
            <text:p>-1.28</text:p>
          </table:table-cell>
          <table:table-cell/>
          <table:table-cell table:style-name="ce70" table:formula="of:=+[$Rentabilidad.C11]" office:value-type="float" office:value="463499.664810987" calcext:value-type="float">
            <text:p>463,500</text:p>
          </table:table-cell>
          <table:table-cell table:style-name="ce71" table:formula="of:=+[$Rentabilidad.C13]" office:value-type="percentage" office:value="0.273634324908836" calcext:value-type="percentage">
            <text:p>27.36 %</text:p>
          </table:table-cell>
          <table:table-cell table:style-name="ce79" table:formula="of:=+[$Rentabilidad.C23]" office:value-type="float" office:value="504085.186566147" calcext:value-type="float">
            <text:p>S/ 504,085.19</text:p>
          </table:table-cell>
          <table:table-cell table:style-name="ce71" table:formula="of:=+[$Rentabilidad.C25]" office:value-type="percentage" office:value="0.282726593166351" calcext:value-type="percentage">
            <text:p>28.27 %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23" office:value-type="string" calcext:value-type="string">
            <text:p>Valor de venta G90</text:p>
          </table:table-cell>
          <table:table-cell table:style-name="ce23"/>
          <table:table-cell table:style-name="ce43" office:value-type="percentage" office:value="0" calcext:value-type="percentage">
            <text:p>0 %</text:p>
          </table:table-cell>
          <table:table-cell table:style-name="ce54" office:value-type="percentage" office:value="-0.145739220930804" calcext:value-type="percentage">
            <text:p>-14.57 %</text:p>
          </table:table-cell>
          <table:table-cell table:style-name="ce58" table:formula="of:=+[$Resumen.C5]*(1+[$'Análisis de sensibilidad'.G7])" office:value-type="float" office:value="9.43596185965076" calcext:value-type="float">
            <text:p>9.4360</text:p>
          </table:table-cell>
          <table:table-cell table:style-name="ce67" table:formula="of:=+[$Resumen.C5]" office:value-type="float" office:value="11.0457627118644" calcext:value-type="float">
            <text:p>11.05</text:p>
          </table:table-cell>
          <table:table-cell table:style-name="ce67" table:formula="of:=+[.H7]-[.I7]" office:value-type="float" office:value="-1.60980085221364" calcext:value-type="float">
            <text:p>-1.61</text:p>
          </table:table-cell>
          <table:table-cell table:number-columns-repeated="2"/>
          <table:table-cell table:style-name="ce72"/>
          <table:table-cell table:style-name="ce80"/>
          <table:table-cell table:style-name="ce72"/>
          <table:table-cell/>
          <table:table-cell table:style-name="ce87"/>
          <table:table-cell table:number-columns-repeated="16367"/>
        </table:table-row>
        <table:table-row table:style-name="ro1">
          <table:table-cell table:number-columns-repeated="3"/>
          <table:table-cell table:style-name="ce23" office:value-type="string" calcext:value-type="string">
            <text:p>Valor de venta G95</text:p>
          </table:table-cell>
          <table:table-cell table:style-name="ce23"/>
          <table:table-cell table:style-name="ce44" office:value-type="percentage" office:value="0" calcext:value-type="percentage">
            <text:p>0 %</text:p>
          </table:table-cell>
          <table:table-cell table:style-name="ce54" office:value-type="percentage" office:value="-0.583410271173985" calcext:value-type="percentage">
            <text:p>-58.34 %</text:p>
          </table:table-cell>
          <table:table-cell table:style-name="ce58" table:formula="of:=+[$Resumen.C6]*(1+[$'Análisis de sensibilidad'.G8])" office:value-type="float" office:value="5.92810008456564" calcext:value-type="float">
            <text:p>5.9281</text:p>
          </table:table-cell>
          <table:table-cell table:style-name="ce67" table:formula="of:=+[$Resumen.C6]" office:value-type="float" office:value="14.2300677966102" calcext:value-type="float">
            <text:p>14.23</text:p>
          </table:table-cell>
          <table:table-cell table:style-name="ce67" table:formula="of:=+[.H8]-[.I8]" office:value-type="float" office:value="-8.30196771204453" calcext:value-type="float">
            <text:p>-8.30</text:p>
          </table:table-cell>
          <table:table-cell table:number-columns-repeated="2"/>
          <table:table-cell table:style-name="ce73" table:number-columns-repeated="3"/>
          <table:table-cell/>
          <table:table-cell table:style-name="ce88"/>
          <table:table-cell table:number-columns-repeated="16367"/>
        </table:table-row>
        <table:table-row table:style-name="ro1">
          <table:table-cell table:number-columns-repeated="3"/>
          <table:table-cell table:style-name="ce23" office:value-type="string" calcext:value-type="string">
            <text:p>Valor de compra DB5</text:p>
          </table:table-cell>
          <table:table-cell table:style-name="ce23"/>
          <table:table-cell table:style-name="ce43" office:value-type="percentage" office:value="0" calcext:value-type="percentage">
            <text:p>0 %</text:p>
          </table:table-cell>
          <table:table-cell table:style-name="ce53" office:value-type="percentage" office:value="0.155024830214794" calcext:value-type="percentage">
            <text:p>15.50 %</text:p>
          </table:table-cell>
          <table:table-cell table:style-name="ce58" table:formula="of:=+[$Resumen.C10]*(1+[$'Análisis de sensibilidad'.G9])" office:value-type="float" office:value="9.3082276465488" calcext:value-type="float">
            <text:p>9.3082</text:p>
          </table:table-cell>
          <table:table-cell table:style-name="ce67" table:formula="of:=+[$Resumen.C10]" office:value-type="float" office:value="8.05889830508475" calcext:value-type="float">
            <text:p>8.06</text:p>
          </table:table-cell>
          <table:table-cell table:style-name="ce67" table:formula="of:=+[.H9]-[.I9]" office:value-type="float" office:value="1.24932934146405" calcext:value-type="float">
            <text:p>1.25</text:p>
          </table:table-cell>
          <table:table-cell table:number-columns-repeated="2"/>
          <table:table-cell table:style-name="ce72"/>
          <table:table-cell table:style-name="ce80"/>
          <table:table-cell table:style-name="ce72"/>
          <table:table-cell/>
          <table:table-cell table:style-name="ce89"/>
          <table:table-cell table:number-columns-repeated="16367"/>
        </table:table-row>
        <table:table-row table:style-name="ro1">
          <table:table-cell table:number-columns-repeated="3"/>
          <table:table-cell table:style-name="ce23" office:value-type="string" calcext:value-type="string">
            <text:p>Valor de compra G90</text:p>
          </table:table-cell>
          <table:table-cell table:style-name="ce23"/>
          <table:table-cell table:style-name="ce43" office:value-type="percentage" office:value="0" calcext:value-type="percentage">
            <text:p>0 %</text:p>
          </table:table-cell>
          <table:table-cell table:style-name="ce54" office:value-type="percentage" office:value="0.192322219397864" calcext:value-type="percentage">
            <text:p>19.23 %</text:p>
          </table:table-cell>
          <table:table-cell table:style-name="ce58" table:formula="of:=+[$Resumen.C11]*(1+[$'Análisis de sensibilidad'.G10])" office:value-type="float" office:value="9.77198998626843" calcext:value-type="float">
            <text:p>9.7720</text:p>
          </table:table-cell>
          <table:table-cell table:style-name="ce67" table:formula="of:=+[$Resumen.C11]" office:value-type="float" office:value="8.19576271186441" calcext:value-type="float">
            <text:p>8.20</text:p>
          </table:table-cell>
          <table:table-cell table:style-name="ce67" table:formula="of:=+[.H10]-[.I10]" office:value-type="float" office:value="1.57622727440402" calcext:value-type="float">
            <text:p>1.58</text:p>
          </table:table-cell>
          <table:table-cell table:number-columns-repeated="2"/>
          <table:table-cell table:style-name="ce72"/>
          <table:table-cell table:style-name="ce80"/>
          <table:table-cell table:style-name="ce72"/>
          <table:table-cell/>
          <table:table-cell table:style-name="ce90"/>
          <table:table-cell table:number-columns-repeated="16367"/>
        </table:table-row>
        <table:table-row table:style-name="ro1">
          <table:table-cell table:number-columns-repeated="3"/>
          <table:table-cell table:style-name="ce23" office:value-type="string" calcext:value-type="string">
            <text:p>Valor de compra G95</text:p>
          </table:table-cell>
          <table:table-cell table:style-name="ce23"/>
          <table:table-cell table:style-name="ce43" office:value-type="percentage" office:value="0" calcext:value-type="percentage">
            <text:p>0 %</text:p>
          </table:table-cell>
          <table:table-cell table:style-name="ce54" office:value-type="percentage" office:value="0.801353792513108" calcext:value-type="percentage">
            <text:p>80.14 %</text:p>
          </table:table-cell>
          <table:table-cell table:style-name="ce58" table:formula="of:=+[$Resumen.C12]*(1+[$'Análisis de sensibilidad'.G11])" office:value-type="float" office:value="11.7385935770054" calcext:value-type="float">
            <text:p>11.7386</text:p>
          </table:table-cell>
          <table:table-cell table:style-name="ce67" table:formula="of:=+[$Resumen.C12]" office:value-type="float" office:value="6.5165397412735" calcext:value-type="float">
            <text:p>6.52</text:p>
          </table:table-cell>
          <table:table-cell table:style-name="ce67" table:formula="of:=+[.H11]-[.I11]" office:value-type="float" office:value="5.2220538357319" calcext:value-type="float">
            <text:p>5.22</text:p>
          </table:table-cell>
          <table:table-cell table:number-columns-repeated="2"/>
          <table:table-cell table:style-name="ce72"/>
          <table:table-cell table:style-name="ce80"/>
          <table:table-cell table:style-name="ce72"/>
          <table:table-cell table:number-columns-repeated="16369"/>
        </table:table-row>
        <table:table-row table:style-name="ro1">
          <table:table-cell table:number-columns-repeated="3"/>
          <table:table-cell table:style-name="ce23" office:value-type="string" calcext:value-type="string">
            <text:p>Inversión Activo tangible</text:p>
          </table:table-cell>
          <table:table-cell table:style-name="ce23"/>
          <table:table-cell table:style-name="ce43" office:value-type="percentage" office:value="0" calcext:value-type="percentage">
            <text:p>0 %</text:p>
          </table:table-cell>
          <table:table-cell table:style-name="ce55" office:value-type="percentage" office:value="0.338990817581076" calcext:value-type="percentage">
            <text:p>33.90 %</text:p>
          </table:table-cell>
          <table:table-cell table:style-name="ce59" table:formula="of:=+[$'Inversión inicial'.F8]*(1+[$'Análisis de sensibilidad'.G12])" office:value-type="float" office:value="1004544.47851986" calcext:value-type="float">
            <text:p>1,004,544.48</text:p>
          </table:table-cell>
          <table:table-cell table:style-name="ce59" table:formula="of:=+[$'Inversión inicial'.F8]" office:value-type="float" office:value="750225.069007264" calcext:value-type="float">
            <text:p>750,225.07</text:p>
          </table:table-cell>
          <table:table-cell table:style-name="ce67" table:formula="of:=+[.H12]-[.I12]" office:value-type="float" office:value="254319.409512592" calcext:value-type="float">
            <text:p>254319.41</text:p>
          </table:table-cell>
          <table:table-cell table:number-columns-repeated="2"/>
          <table:table-cell table:style-name="ce72"/>
          <table:table-cell table:style-name="ce80"/>
          <table:table-cell table:style-name="ce72"/>
          <table:table-cell table:number-columns-repeated="16369"/>
        </table:table-row>
        <table:table-row table:style-name="ro1">
          <table:table-cell table:number-columns-repeated="3"/>
          <table:table-cell table:style-name="ce23" office:value-type="string" calcext:value-type="string">
            <text:p>Tasa de crecimiento</text:p>
          </table:table-cell>
          <table:table-cell table:style-name="ce23"/>
          <table:table-cell table:style-name="ce43" office:value-type="percentage" office:value="0" calcext:value-type="percentage">
            <text:p>0 %</text:p>
          </table:table-cell>
          <table:table-cell table:style-name="ce55" office:value-type="percentage" office:value="-1.39559566514371" calcext:value-type="percentage">
            <text:p>-139.56 %</text:p>
          </table:table-cell>
          <table:table-cell table:style-name="ce43" table:formula="of:=+[$Resumen.F7]*(1+[$'Análisis de sensibilidad'.G13])" office:value-type="percentage" office:value="-0.0276916965600597" calcext:value-type="percentage">
            <text:p>-3 %</text:p>
          </table:table-cell>
          <table:table-cell table:style-name="ce44" table:formula="of:=+[$Resumen.F7]" office:value-type="percentage" office:value="0.07" calcext:value-type="percentage">
            <text:p>7 %</text:p>
          </table:table-cell>
          <table:table-cell table:style-name="ce43" table:formula="of:=+[.H13]-[.I13]" office:value-type="percentage" office:value="-0.0976916965600597" calcext:value-type="percentage">
            <text:p>-10 %</text:p>
          </table:table-cell>
          <table:table-cell table:number-columns-repeated="2"/>
          <table:table-cell table:style-name="ce72"/>
          <table:table-cell table:style-name="ce80"/>
          <table:table-cell table:style-name="ce72"/>
          <table:table-cell table:number-columns-repeated="16369"/>
        </table:table-row>
        <table:table-row table:style-name="ro1">
          <table:table-cell table:number-columns-repeated="12"/>
          <table:table-cell table:style-name="ce72"/>
          <table:table-cell table:style-name="ce80"/>
          <table:table-cell table:style-name="ce72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21" office:value-type="string" calcext:value-type="string">
            <text:p>Análisis de sensibilidad unidimesniona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24" office:value-type="string" calcext:value-type="string" table:number-columns-spanned="6" table:number-rows-spanned="1">
            <text:p>Sensibilidad del valor de venta de Diesel B5</text:p>
          </table:table-cell>
          <table:covered-table-cell table:number-columns-repeated="5" table:style-name="ce24"/>
          <table:table-cell/>
          <table:table-cell table:style-name="ce24" office:value-type="string" calcext:value-type="string" table:number-columns-spanned="6" table:number-rows-spanned="1">
            <text:p>Sensibilidad del valor de venta de Gasohol 90</text:p>
          </table:table-cell>
          <table:covered-table-cell table:number-columns-repeated="5" table:style-name="ce24"/>
          <table:table-cell table:style-name="ce91" table:number-columns-repeated="2"/>
          <table:table-cell/>
          <table:table-cell table:style-name="ce24" office:value-type="string" calcext:value-type="string" table:number-columns-spanned="6" table:number-rows-spanned="1">
            <text:p>Sensibilidad del valor de venta de Gasohol 95</text:p>
          </table:table-cell>
          <table:covered-table-cell table:number-columns-repeated="5" table:style-name="ce24"/>
          <table:table-cell table:number-columns-repeated="16359"/>
        </table:table-row>
        <table:table-row table:style-name="ro1">
          <table:table-cell table:number-columns-repeated="3"/>
          <table:table-cell table:style-name="ce25" office:value-type="string" calcext:value-type="string">
            <text:p>V. Venta</text:p>
          </table:table-cell>
          <table:table-cell table:style-name="ce25" office:value-type="string" calcext:value-type="string">
            <text:p>Var. porc.</text:p>
          </table:table-cell>
          <table:table-cell table:style-name="ce25" office:value-type="string" calcext:value-type="string">
            <text:p>VANE </text:p>
          </table:table-cell>
          <table:table-cell table:style-name="ce25" office:value-type="string" calcext:value-type="string">
            <text:p>TIRE</text:p>
          </table:table-cell>
          <table:table-cell table:style-name="ce25" office:value-type="string" calcext:value-type="string">
            <text:p>VANF</text:p>
          </table:table-cell>
          <table:table-cell table:style-name="ce25" office:value-type="string" calcext:value-type="string">
            <text:p>TIRF</text:p>
          </table:table-cell>
          <table:table-cell/>
          <table:table-cell table:style-name="ce23" office:value-type="string" calcext:value-type="string">
            <text:p>V. Venta</text:p>
          </table:table-cell>
          <table:table-cell table:style-name="ce23" office:value-type="string" calcext:value-type="string">
            <text:p>Var. porc.</text:p>
          </table:table-cell>
          <table:table-cell table:style-name="ce25" office:value-type="string" calcext:value-type="string">
            <text:p>VANE </text:p>
          </table:table-cell>
          <table:table-cell table:style-name="ce25" office:value-type="string" calcext:value-type="string">
            <text:p>TIRE</text:p>
          </table:table-cell>
          <table:table-cell table:style-name="ce25" office:value-type="string" calcext:value-type="string">
            <text:p>VANF</text:p>
          </table:table-cell>
          <table:table-cell table:style-name="ce25" office:value-type="string" calcext:value-type="string">
            <text:p>TIRF</text:p>
          </table:table-cell>
          <table:table-cell table:style-name="ce92" table:number-columns-repeated="2"/>
          <table:table-cell/>
          <table:table-cell table:style-name="ce23" office:value-type="string" calcext:value-type="string">
            <text:p>V. Venta</text:p>
          </table:table-cell>
          <table:table-cell table:style-name="ce23" office:value-type="string" calcext:value-type="string">
            <text:p>Var. porc.</text:p>
          </table:table-cell>
          <table:table-cell table:style-name="ce25" office:value-type="string" calcext:value-type="string">
            <text:p>VANE </text:p>
          </table:table-cell>
          <table:table-cell table:style-name="ce25" office:value-type="string" calcext:value-type="string">
            <text:p>TIRE</text:p>
          </table:table-cell>
          <table:table-cell table:style-name="ce25" office:value-type="string" calcext:value-type="string">
            <text:p>VANF</text:p>
          </table:table-cell>
          <table:table-cell table:style-name="ce25" office:value-type="string" calcext:value-type="string">
            <text:p>TIRF</text:p>
          </table:table-cell>
          <table:table-cell table:number-columns-repeated="16359"/>
        </table:table-row>
        <table:table-row table:style-name="ro1">
          <table:table-cell table:number-columns-repeated="3"/>
          <table:table-cell table:style-name="ce26"/>
          <table:table-cell table:style-name="ce35"/>
          <table:table-cell table:style-name="ce45" table:formula="of:=+[$Rentabilidad.C11]" office:value-type="float" office:value="463499.664810987" calcext:value-type="float">
            <text:p>463499.66</text:p>
          </table:table-cell>
          <table:table-cell table:style-name="ce56" table:formula="of:=+[$Rentabilidad.C13]" office:value-type="percentage" office:value="0.273634324908836" calcext:value-type="percentage">
            <text:p>27.36 %</text:p>
          </table:table-cell>
          <table:table-cell table:style-name="ce60" table:formula="of:=+[$Rentabilidad.C23]" office:value-type="float" office:value="504085.186566147" calcext:value-type="float">
            <text:p>504085.2</text:p>
          </table:table-cell>
          <table:table-cell table:style-name="ce56" table:formula="of:=+[$Rentabilidad.C25]" office:value-type="percentage" office:value="0.282726593166351" calcext:value-type="percentage">
            <text:p>28.27 %</text:p>
          </table:table-cell>
          <table:table-cell/>
          <table:table-cell table:style-name="ce69" table:number-columns-repeated="2"/>
          <table:table-cell table:style-name="ce74" table:formula="of:=+[$Rentabilidad.C11]" office:value-type="float" office:value="463499.664810987" calcext:value-type="float">
            <text:p>463,500</text:p>
          </table:table-cell>
          <table:table-cell table:style-name="ce81" table:formula="of:=+[$Rentabilidad.C13]" office:value-type="percentage" office:value="0.273634324908836" calcext:value-type="percentage">
            <text:p>27.36 %</text:p>
          </table:table-cell>
          <table:table-cell table:style-name="ce82" table:formula="of:=+[$Rentabilidad.C23]" office:value-type="float" office:value="504085.186566147" calcext:value-type="float">
            <text:p>S/ 504,085.2</text:p>
          </table:table-cell>
          <table:table-cell table:style-name="ce81" table:formula="of:=+[$Rentabilidad.C25]" office:value-type="percentage" office:value="0.282726593166351" calcext:value-type="percentage">
            <text:p>28.27 %</text:p>
          </table:table-cell>
          <table:table-cell table:style-name="ce93" table:number-columns-repeated="2"/>
          <table:table-cell/>
          <table:table-cell table:style-name="ce69" table:number-columns-repeated="2"/>
          <table:table-cell table:style-name="ce100" table:formula="of:=+[$Rentabilidad.C11]" office:value-type="float" office:value="383537.870376764" calcext:value-type="float">
            <text:p>383,537.9</text:p>
          </table:table-cell>
          <table:table-cell table:style-name="ce81" table:formula="of:=+[$Rentabilidad.C13]" office:value-type="percentage" office:value="0.238841809921468" calcext:value-type="percentage">
            <text:p>23.88 %</text:p>
          </table:table-cell>
          <table:table-cell table:style-name="ce82" table:formula="of:=+[$Rentabilidad.C23]" office:value-type="float" office:value="504085.186566147" calcext:value-type="float">
            <text:p>S/ 504,085.2</text:p>
          </table:table-cell>
          <table:table-cell table:style-name="ce81" table:formula="of:=+[$Rentabilidad.C25]" office:value-type="percentage" office:value="0.282726593166351" calcext:value-type="percentage">
            <text:p>28.27 %</text:p>
          </table:table-cell>
          <table:table-cell table:number-columns-repeated="16359"/>
        </table:table-row>
        <table:table-row table:style-name="ro1">
          <table:table-cell table:number-columns-repeated="3"/>
          <table:table-cell table:style-name="ce27" table:formula="of:=+[.$D$26]*(1+[.E21])" office:value-type="float" office:value="8.85188537741588" calcext:value-type="float">
            <text:p>8.85</text:p>
          </table:table-cell>
          <table:table-cell table:style-name="ce36" table:formula="of:=+[.E22]-0.04" office:value-type="percentage" office:value="-0.195902637001483" calcext:value-type="percentage">
            <text:p>-19.6%</text:p>
          </table:table-cell>
          <table:table-cell table:style-name="ce46" table:formula="of:=MULTIPLE.OPERATIONS([.F$20];[.$F$6];[.$E21])" office:value-type="float" office:value="69331.451658934" calcext:value-type="float">
            <text:p>69331.45</text:p>
          </table:table-cell>
          <table:table-cell table:style-name="ce54" table:formula="of:=MULTIPLE.OPERATIONS([.G$20];[.$F$6];[.$E21])" office:value-type="percentage" office:value="0.177989327445242" calcext:value-type="percentage">
            <text:p>17.80 %</text:p>
          </table:table-cell>
          <table:table-cell table:style-name="ce61" office:value-type="float" office:value="-36777.1288587398" calcext:value-type="float">
            <text:p>-36777.1</text:p>
          </table:table-cell>
          <table:table-cell table:style-name="ce54" office:value-type="percentage" office:value="0.148640498483005" calcext:value-type="percentage">
            <text:p>14.86 %</text:p>
          </table:table-cell>
          <table:table-cell/>
          <table:table-cell table:style-name="ce27" table:formula="of:=+[.$K$26]*(1+[.L21])" office:value-type="float" office:value="8.55230084270161" calcext:value-type="float">
            <text:p>8.55</text:p>
          </table:table-cell>
          <table:table-cell table:style-name="ce36" table:formula="of:=+[.L22]-0.04" office:value-type="percentage" office:value="-0.225739220930804" calcext:value-type="percentage">
            <text:p>-22.6%</text:p>
          </table:table-cell>
          <table:table-cell table:style-name="ce75" table:formula="of:=MULTIPLE.OPERATIONS([.M$20];[.$F$7];[.$L21])" office:value-type="float" office:value="101590.871114059" calcext:value-type="float">
            <text:p>101590.871114059</text:p>
          </table:table-cell>
          <table:table-cell table:style-name="ce54" table:formula="of:=MULTIPLE.OPERATIONS([.N$20];[.$F$7];[.$L21])" office:value-type="percentage" office:value="0.186246262446268" calcext:value-type="percentage">
            <text:p>18.62 %</text:p>
          </table:table-cell>
          <table:table-cell table:style-name="ce83" office:value-type="float" office:value="-4517.70940361502" calcext:value-type="float">
            <text:p>-S/ 4,517.7</text:p>
          </table:table-cell>
          <table:table-cell table:style-name="ce54" office:value-type="percentage" office:value="0.157202214411899" calcext:value-type="percentage">
            <text:p>15.72 %</text:p>
          </table:table-cell>
          <table:table-cell table:style-name="ce93" table:number-columns-repeated="2"/>
          <table:table-cell/>
          <table:table-cell table:style-name="ce29" table:formula="of:=+[.$T$26]*(1+[.U21])" office:value-type="float" office:value="10.9696588205312" calcext:value-type="float">
            <text:p>11.0</text:p>
          </table:table-cell>
          <table:table-cell table:style-name="ce36" table:formula="of:=+[.U22]-0.04" office:value-type="percentage" office:value="-0.22912111331301" calcext:value-type="percentage">
            <text:p>-22.9%</text:p>
          </table:table-cell>
          <table:table-cell table:style-name="ce101" table:formula="of:=MULTIPLE.OPERATIONS([.V$20];[.$F$8];[.$U21])" office:value-type="float" office:value="291933.193560387" calcext:value-type="float">
            <text:p>291,933.2</text:p>
          </table:table-cell>
          <table:table-cell table:style-name="ce54" table:formula="of:=MULTIPLE.OPERATIONS([.W$20];[.$F$8];[.$U21])" office:value-type="percentage" office:value="0.216738126891182" calcext:value-type="percentage">
            <text:p>21.67 %</text:p>
          </table:table-cell>
          <table:table-cell table:style-name="ce105" office:value-type="float" office:value="265786.407476937" calcext:value-type="float">
            <text:p>S/ 265,786.4</text:p>
          </table:table-cell>
          <table:table-cell table:style-name="ce54" office:value-type="percentage" office:value="0.225704736946343" calcext:value-type="percentage">
            <text:p>22.57 %</text:p>
          </table:table-cell>
          <table:table-cell table:number-columns-repeated="16359"/>
        </table:table-row>
        <table:table-row table:style-name="ro1">
          <table:table-cell table:number-columns-repeated="3"/>
          <table:table-cell table:style-name="ce27" table:formula="of:=+[.$D$26]*(1+[.E22])" office:value-type="float" office:value="9.29222436046673" calcext:value-type="float">
            <text:p>9.29</text:p>
          </table:table-cell>
          <table:table-cell table:style-name="ce36" table:formula="of:=+[.E23]-0.04" office:value-type="percentage" office:value="-0.155902637001483" calcext:value-type="percentage">
            <text:p>-15.6%</text:p>
          </table:table-cell>
          <table:table-cell table:style-name="ce46" table:formula="of:=MULTIPLE.OPERATIONS([.F$20];[.$F$6];[.$E22])" office:value-type="float" office:value="149813.923806375" calcext:value-type="float">
            <text:p>149813.92</text:p>
          </table:table-cell>
          <table:table-cell table:style-name="ce54" table:formula="of:=MULTIPLE.OPERATIONS([.G$20];[.$F$6];[.$E22])" office:value-type="percentage" office:value="0.19825846937502" calcext:value-type="percentage">
            <text:p>19.83 %</text:p>
          </table:table-cell>
          <table:table-cell table:style-name="ce61" office:value-type="float" office:value="43705.3432887016" calcext:value-type="float">
            <text:p>43705.3</text:p>
          </table:table-cell>
          <table:table-cell table:style-name="ce54" office:value-type="percentage" office:value="0.169843285940141" calcext:value-type="percentage">
            <text:p>16.98 %</text:p>
          </table:table-cell>
          <table:table-cell/>
          <table:table-cell table:style-name="ce27" table:formula="of:=+[.$K$26]*(1+[.L22])" office:value-type="float" office:value="8.99413135117619" calcext:value-type="float">
            <text:p>8.99</text:p>
          </table:table-cell>
          <table:table-cell table:style-name="ce36" table:formula="of:=+[.L23]-0.04" office:value-type="percentage" office:value="-0.185739220930804" calcext:value-type="percentage">
            <text:p>-18.6%</text:p>
          </table:table-cell>
          <table:table-cell table:style-name="ce75" table:formula="of:=MULTIPLE.OPERATIONS([.M$20];[.$F$7];[.$L22])" office:value-type="float" office:value="165719.522254901" calcext:value-type="float">
            <text:p>165719.522254901</text:p>
          </table:table-cell>
          <table:table-cell table:style-name="ce54" table:formula="of:=MULTIPLE.OPERATIONS([.N$20];[.$F$7];[.$L22])" office:value-type="percentage" office:value="0.202312017150787" calcext:value-type="percentage">
            <text:p>20.23 %</text:p>
          </table:table-cell>
          <table:table-cell table:style-name="ce83" office:value-type="float" office:value="59610.9417372276" calcext:value-type="float">
            <text:p>S/ 59,610.9</text:p>
          </table:table-cell>
          <table:table-cell table:style-name="ce54" office:value-type="percentage" office:value="0.173999403658512" calcext:value-type="percentage">
            <text:p>17.40 %</text:p>
          </table:table-cell>
          <table:table-cell table:style-name="ce93" table:number-columns-repeated="2"/>
          <table:table-cell/>
          <table:table-cell table:style-name="ce29" table:formula="of:=+[.$T$26]*(1+[.U22])" office:value-type="float" office:value="11.5388615323956" calcext:value-type="float">
            <text:p>11.5</text:p>
          </table:table-cell>
          <table:table-cell table:style-name="ce36" table:formula="of:=+[.U23]-0.04" office:value-type="percentage" office:value="-0.18912111331301" calcext:value-type="percentage">
            <text:p>-18.9%</text:p>
          </table:table-cell>
          <table:table-cell table:style-name="ce101" table:formula="of:=MULTIPLE.OPERATIONS([.V$20];[.$F$8];[.$U22])" office:value-type="float" office:value="307925.552447232" calcext:value-type="float">
            <text:p>307,925.6</text:p>
          </table:table-cell>
          <table:table-cell table:style-name="ce54" table:formula="of:=MULTIPLE.OPERATIONS([.W$20];[.$F$8];[.$U22])" office:value-type="percentage" office:value="0.220630093573102" calcext:value-type="percentage">
            <text:p>22.06 %</text:p>
          </table:table-cell>
          <table:table-cell table:style-name="ce105" office:value-type="float" office:value="281778.766363781" calcext:value-type="float">
            <text:p>S/ 281,778.8</text:p>
          </table:table-cell>
          <table:table-cell table:style-name="ce54" office:value-type="percentage" office:value="0.229602659857532" calcext:value-type="percentage">
            <text:p>22.96 %</text:p>
          </table:table-cell>
          <table:table-cell table:number-columns-repeated="16359"/>
        </table:table-row>
        <table:table-row table:style-name="ro1">
          <table:table-cell table:number-columns-repeated="3"/>
          <table:table-cell table:style-name="ce27" table:formula="of:=+[.$D$26]*(1+[.E23])" office:value-type="float" office:value="9.73256334351757" calcext:value-type="float">
            <text:p>9.73</text:p>
          </table:table-cell>
          <table:table-cell table:style-name="ce36" table:formula="of:=+[.G6]" office:value-type="percentage" office:value="-0.115902637001483" calcext:value-type="percentage">
            <text:p>-11.6%</text:p>
          </table:table-cell>
          <table:table-cell table:style-name="ce46" table:formula="of:=MULTIPLE.OPERATIONS([.F$20];[.$F$6];[.$E23])" office:value-type="float" office:value="230296.395953816" calcext:value-type="float">
            <text:p>230296.40</text:p>
          </table:table-cell>
          <table:table-cell table:style-name="ce54" table:formula="of:=MULTIPLE.OPERATIONS([.G$20];[.$F$6];[.$E23])" office:value-type="percentage" office:value="0.218095368614266" calcext:value-type="percentage">
            <text:p>21.81 %</text:p>
          </table:table-cell>
          <table:table-cell table:style-name="ce61" office:value-type="float" office:value="124187.815436142" calcext:value-type="float">
            <text:p>124187.8</text:p>
          </table:table-cell>
          <table:table-cell table:style-name="ce54" office:value-type="percentage" office:value="0.190491958621688" calcext:value-type="percentage">
            <text:p>19.05 %</text:p>
          </table:table-cell>
          <table:table-cell/>
          <table:table-cell table:style-name="ce27" table:formula="of:=+[.$K$26]*(1+[.L23])" office:value-type="float" office:value="9.43596185965076" calcext:value-type="float">
            <text:p>9.44</text:p>
          </table:table-cell>
          <table:table-cell table:style-name="ce36" table:formula="of:=+[.G7]" office:value-type="percentage" office:value="-0.145739220930804" calcext:value-type="percentage">
            <text:p>-14.6%</text:p>
          </table:table-cell>
          <table:table-cell table:style-name="ce75" table:formula="of:=MULTIPLE.OPERATIONS([.M$20];[.$F$7];[.$L23])" office:value-type="float" office:value="229848.173395744" calcext:value-type="float">
            <text:p>229848.173395744</text:p>
          </table:table-cell>
          <table:table-cell table:style-name="ce54" table:formula="of:=MULTIPLE.OPERATIONS([.N$20];[.$F$7];[.$L23])" office:value-type="percentage" office:value="0.218093956555516" calcext:value-type="percentage">
            <text:p>21.81 %</text:p>
          </table:table-cell>
          <table:table-cell table:style-name="ce83" office:value-type="float" office:value="123739.59287807" calcext:value-type="float">
            <text:p>S/ 123,739.6</text:p>
          </table:table-cell>
          <table:table-cell table:style-name="ce54" office:value-type="percentage" office:value="0.190436101494648" calcext:value-type="percentage">
            <text:p>19.04 %</text:p>
          </table:table-cell>
          <table:table-cell table:style-name="ce93" table:number-columns-repeated="2"/>
          <table:table-cell/>
          <table:table-cell table:style-name="ce29" table:formula="of:=+[.$T$26]*(1+[.U23])" office:value-type="float" office:value="12.10806424426" calcext:value-type="float">
            <text:p>12.1</text:p>
          </table:table-cell>
          <table:table-cell table:style-name="ce36" office:value-type="percentage" office:value="-0.14912111331301" calcext:value-type="percentage">
            <text:p>-14.9%</text:p>
          </table:table-cell>
          <table:table-cell table:style-name="ce101" table:formula="of:=MULTIPLE.OPERATIONS([.V$20];[.$F$8];[.$U23])" office:value-type="float" office:value="323917.911334076" calcext:value-type="float">
            <text:p>323,917.9</text:p>
          </table:table-cell>
          <table:table-cell table:style-name="ce54" table:formula="of:=MULTIPLE.OPERATIONS([.W$20];[.$F$8];[.$U23])" office:value-type="percentage" office:value="0.224507564136916" calcext:value-type="percentage">
            <text:p>22.45 %</text:p>
          </table:table-cell>
          <table:table-cell table:style-name="ce105" office:value-type="float" office:value="297771.125250626" calcext:value-type="float">
            <text:p>S/ 297,771.1</text:p>
          </table:table-cell>
          <table:table-cell table:style-name="ce54" office:value-type="percentage" office:value="0.233486269310091" calcext:value-type="percentage">
            <text:p>23.35 %</text:p>
          </table:table-cell>
          <table:table-cell table:number-columns-repeated="16359"/>
        </table:table-row>
        <table:table-row table:style-name="ro1">
          <table:table-cell table:number-columns-repeated="3"/>
          <table:table-cell table:style-name="ce27" table:formula="of:=+[.$D$26]*(1+[.E24])" office:value-type="float" office:value="10.1277966101695" calcext:value-type="float">
            <text:p>10.13</text:p>
          </table:table-cell>
          <table:table-cell table:style-name="ce36" table:formula="of:=+[.E25]-0.04" office:value-type="percentage" office:value="-0.08" calcext:value-type="percentage">
            <text:p>-8.0%</text:p>
          </table:table-cell>
          <table:table-cell table:style-name="ce46" table:formula="of:=MULTIPLE.OPERATIONS([.F$20];[.$F$6];[.$E24])" office:value-type="float" office:value="302534.720516105" calcext:value-type="float">
            <text:p>302534.72</text:p>
          </table:table-cell>
          <table:table-cell table:style-name="ce54" table:formula="of:=MULTIPLE.OPERATIONS([.G$20];[.$F$6];[.$E24])" office:value-type="percentage" office:value="0.23558006305363" calcext:value-type="percentage">
            <text:p>23.56 %</text:p>
          </table:table-cell>
          <table:table-cell table:style-name="ce61" office:value-type="float" office:value="196426.139998431" calcext:value-type="float">
            <text:p>196426.1</text:p>
          </table:table-cell>
          <table:table-cell table:style-name="ce54" office:value-type="percentage" office:value="0.208616127614612" calcext:value-type="percentage">
            <text:p>20.86 %</text:p>
          </table:table-cell>
          <table:table-cell/>
          <table:table-cell table:style-name="ce27" table:formula="of:=+[.$K$26]*(1+[.L24])" office:value-type="float" office:value="10.1621016949153" calcext:value-type="float">
            <text:p>10.16</text:p>
          </table:table-cell>
          <table:table-cell table:style-name="ce36" table:formula="of:=+[.L25]-0.04" office:value-type="percentage" office:value="-0.08" calcext:value-type="percentage">
            <text:p>-8.0%</text:p>
          </table:table-cell>
          <table:table-cell table:style-name="ce75" table:formula="of:=MULTIPLE.OPERATIONS([.M$20];[.$F$7];[.$L24])" office:value-type="float" office:value="335242.362529302" calcext:value-type="float">
            <text:p>335242.362529302</text:p>
          </table:table-cell>
          <table:table-cell table:style-name="ce54" table:formula="of:=MULTIPLE.OPERATIONS([.N$20];[.$F$7];[.$L24])" office:value-type="percentage" office:value="0.243491809153308" calcext:value-type="percentage">
            <text:p>24.35 %</text:p>
          </table:table-cell>
          <table:table-cell table:style-name="ce83" office:value-type="float" office:value="229133.782011628" calcext:value-type="float">
            <text:p>S/ 229,133.8</text:p>
          </table:table-cell>
          <table:table-cell table:style-name="ce54" office:value-type="percentage" office:value="0.216766891533531" calcext:value-type="percentage">
            <text:p>21.68 %</text:p>
          </table:table-cell>
          <table:table-cell table:style-name="ce93" table:number-columns-repeated="2"/>
          <table:table-cell/>
          <table:table-cell table:style-name="ce29" table:formula="of:=+[.$T$26]*(1+[.U24])" office:value-type="float" office:value="13.0916623728814" calcext:value-type="float">
            <text:p>13.1</text:p>
          </table:table-cell>
          <table:table-cell table:style-name="ce36" table:formula="of:=+[.U25]-0.04" office:value-type="percentage" office:value="-0.08" calcext:value-type="percentage">
            <text:p>-8.0%</text:p>
          </table:table-cell>
          <table:table-cell table:style-name="ce101" table:formula="of:=MULTIPLE.OPERATIONS([.V$20];[.$F$8];[.$U24])" office:value-type="float" office:value="351553.152603074" calcext:value-type="float">
            <text:p>351,553.2</text:p>
          </table:table-cell>
          <table:table-cell table:style-name="ce54" table:formula="of:=MULTIPLE.OPERATIONS([.W$20];[.$F$8];[.$U24])" office:value-type="percentage" office:value="0.231174952879883" calcext:value-type="percentage">
            <text:p>23.12 %</text:p>
          </table:table-cell>
          <table:table-cell table:style-name="ce105" office:value-type="float" office:value="325406.366519624" calcext:value-type="float">
            <text:p>S/ 325,406.4</text:p>
          </table:table-cell>
          <table:table-cell table:style-name="ce54" office:value-type="percentage" office:value="0.240164686415738" calcext:value-type="percentage">
            <text:p>24.02 %</text:p>
          </table:table-cell>
          <table:table-cell table:number-columns-repeated="16359"/>
        </table:table-row>
        <table:table-row table:style-name="ro1">
          <table:table-cell table:number-columns-repeated="3"/>
          <table:table-cell table:style-name="ce27" table:formula="of:=+[.$D$26]*(1+[.E25])" office:value-type="float" office:value="10.5681355932203" calcext:value-type="float">
            <text:p>10.57</text:p>
          </table:table-cell>
          <table:table-cell table:style-name="ce36" table:formula="of:=+[.E26]-0.04" office:value-type="percentage" office:value="-0.04" calcext:value-type="percentage">
            <text:p>-4.0%</text:p>
          </table:table-cell>
          <table:table-cell table:style-name="ce46" table:formula="of:=MULTIPLE.OPERATIONS([.F$20];[.$F$6];[.$E25])" office:value-type="float" office:value="383017.192663546" calcext:value-type="float">
            <text:p>383017.19</text:p>
          </table:table-cell>
          <table:table-cell table:style-name="ce54" table:formula="of:=MULTIPLE.OPERATIONS([.G$20];[.$F$6];[.$E25])" office:value-type="percentage" office:value="0.254749630275853" calcext:value-type="percentage">
            <text:p>25.47 %</text:p>
          </table:table-cell>
          <table:table-cell table:style-name="ce61" office:value-type="float" office:value="276908.612145872" calcext:value-type="float">
            <text:p>276908.6</text:p>
          </table:table-cell>
          <table:table-cell table:style-name="ce54" office:value-type="percentage" office:value="0.228412307571015" calcext:value-type="percentage">
            <text:p>22.84 %</text:p>
          </table:table-cell>
          <table:table-cell/>
          <table:table-cell table:style-name="ce27" table:formula="of:=+[.$K$26]*(1+[.L25])" office:value-type="float" office:value="10.6039322033898" calcext:value-type="float">
            <text:p>10.60</text:p>
          </table:table-cell>
          <table:table-cell table:style-name="ce36" table:formula="of:=+[.L26]-0.04" office:value-type="percentage" office:value="-0.04" calcext:value-type="percentage">
            <text:p>-4.0%</text:p>
          </table:table-cell>
          <table:table-cell table:style-name="ce75" table:formula="of:=MULTIPLE.OPERATIONS([.M$20];[.$F$7];[.$L25])" office:value-type="float" office:value="399371.013670144" calcext:value-type="float">
            <text:p>399371.013670144</text:p>
          </table:table-cell>
          <table:table-cell table:style-name="ce54" table:formula="of:=MULTIPLE.OPERATIONS([.N$20];[.$F$7];[.$L25])" office:value-type="percentage" office:value="0.258658190417721" calcext:value-type="percentage">
            <text:p>25.87 %</text:p>
          </table:table-cell>
          <table:table-cell table:style-name="ce83" office:value-type="float" office:value="293262.433152471" calcext:value-type="float">
            <text:p>S/ 293,262.4</text:p>
          </table:table-cell>
          <table:table-cell table:style-name="ce54" office:value-type="percentage" office:value="0.232425724323017" calcext:value-type="percentage">
            <text:p>23.24 %</text:p>
          </table:table-cell>
          <table:table-cell table:style-name="ce93" table:number-columns-repeated="2"/>
          <table:table-cell/>
          <table:table-cell table:style-name="ce29" table:formula="of:=+[.$T$26]*(1+[.U25])" office:value-type="float" office:value="13.6608650847458" calcext:value-type="float">
            <text:p>13.7</text:p>
          </table:table-cell>
          <table:table-cell table:style-name="ce36" table:formula="of:=+[.U26]-0.04" office:value-type="percentage" office:value="-0.04" calcext:value-type="percentage">
            <text:p>-4.0%</text:p>
          </table:table-cell>
          <table:table-cell table:style-name="ce101" table:formula="of:=MULTIPLE.OPERATIONS([.V$20];[.$F$8];[.$U25])" office:value-type="float" office:value="367545.511489919" calcext:value-type="float">
            <text:p>367,545.5</text:p>
          </table:table-cell>
          <table:table-cell table:style-name="ce54" table:formula="of:=MULTIPLE.OPERATIONS([.W$20];[.$F$8];[.$U25])" office:value-type="percentage" office:value="0.235014903229426" calcext:value-type="percentage">
            <text:p>23.50 %</text:p>
          </table:table-cell>
          <table:table-cell table:style-name="ce105" office:value-type="float" office:value="341398.725406469" calcext:value-type="float">
            <text:p>S/ 341,398.7</text:p>
          </table:table-cell>
          <table:table-cell table:style-name="ce54" office:value-type="percentage" office:value="0.244011256056406" calcext:value-type="percentage">
            <text:p>24.40 %</text:p>
          </table:table-cell>
          <table:table-cell table:number-columns-repeated="16359"/>
        </table:table-row>
        <table:table-row table:style-name="ro1">
          <table:table-cell table:number-columns-repeated="3"/>
          <table:table-cell table:style-name="ce28" table:formula="of:=+[$Resumen.C4]" office:value-type="float" office:value="11.0084745762712" calcext:value-type="float">
            <text:p>11.01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47" table:formula="of:=MULTIPLE.OPERATIONS([.F$20];[.$F$6];[.$E26])" office:value-type="float" office:value="463499.664810987" calcext:value-type="float">
            <text:p>463499.66</text:p>
          </table:table-cell>
          <table:table-cell table:style-name="ce57" table:formula="of:=MULTIPLE.OPERATIONS([.G$20];[.$F$6];[.$E26])" office:value-type="percentage" office:value="0.273634324908836" calcext:value-type="percentage">
            <text:p>27.36 %</text:p>
          </table:table-cell>
          <table:table-cell table:style-name="ce62" office:value-type="float" office:value="357391.084293313" calcext:value-type="float">
            <text:p>357391.1</text:p>
          </table:table-cell>
          <table:table-cell table:style-name="ce57" office:value-type="percentage" office:value="0.247844951675645" calcext:value-type="percentage">
            <text:p>24.78 %</text:p>
          </table:table-cell>
          <table:table-cell/>
          <table:table-cell table:style-name="ce28" table:formula="of:=+[$Resumen.C5]" office:value-type="float" office:value="11.0457627118644" calcext:value-type="float">
            <text:p>11.05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76" table:formula="of:=MULTIPLE.OPERATIONS([.M$20];[.$F$7];[.$L26])" office:value-type="float" office:value="463499.664810987" calcext:value-type="float">
            <text:p>463499.664810987</text:p>
          </table:table-cell>
          <table:table-cell table:style-name="ce57" table:formula="of:=MULTIPLE.OPERATIONS([.N$20];[.$F$7];[.$L26])" office:value-type="percentage" office:value="0.273634324908836" calcext:value-type="percentage">
            <text:p>27.36 %</text:p>
          </table:table-cell>
          <table:table-cell table:style-name="ce84" office:value-type="float" office:value="357391.084293313" calcext:value-type="float">
            <text:p>S/ 357,391.1</text:p>
          </table:table-cell>
          <table:table-cell table:style-name="ce57" office:value-type="percentage" office:value="0.247844951675645" calcext:value-type="percentage">
            <text:p>24.78 %</text:p>
          </table:table-cell>
          <table:table-cell table:style-name="ce93" table:number-columns-repeated="2"/>
          <table:table-cell/>
          <table:table-cell table:style-name="ce30" table:formula="of:=+[$Resumen.C6]" office:value-type="float" office:value="14.2300677966102" calcext:value-type="float">
            <text:p>14.2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102" table:formula="of:=MULTIPLE.OPERATIONS([.V$20];[.$F$8];[.$U26])" office:value-type="float" office:value="383537.870376764" calcext:value-type="float">
            <text:p>383,537.9</text:p>
          </table:table-cell>
          <table:table-cell table:style-name="ce57" table:formula="of:=MULTIPLE.OPERATIONS([.W$20];[.$F$8];[.$U26])" office:value-type="percentage" office:value="0.238841809921468" calcext:value-type="percentage">
            <text:p>23.88 %</text:p>
          </table:table-cell>
          <table:table-cell table:style-name="ce106" office:value-type="float" office:value="357391.084293313" calcext:value-type="float">
            <text:p>S/ 357,391.1</text:p>
          </table:table-cell>
          <table:table-cell table:style-name="ce57" office:value-type="percentage" office:value="0.247844951675645" calcext:value-type="percentage">
            <text:p>24.78 %</text:p>
          </table:table-cell>
          <table:table-cell table:number-columns-repeated="16359"/>
        </table:table-row>
        <table:table-row table:style-name="ro1">
          <table:table-cell table:number-columns-repeated="3"/>
          <table:table-cell table:style-name="ce27" table:formula="of:=+[.$D$26]*(1+[.E27])" office:value-type="float" office:value="11.448813559322" calcext:value-type="float">
            <text:p>11.45</text:p>
          </table:table-cell>
          <table:table-cell table:style-name="ce36" table:formula="of:=+[.E26]+0.04" office:value-type="percentage" office:value="0.04" calcext:value-type="percentage">
            <text:p>4.0%</text:p>
          </table:table-cell>
          <table:table-cell table:style-name="ce46" table:formula="of:=MULTIPLE.OPERATIONS([.F$20];[.$F$6];[.$E27])" office:value-type="float" office:value="543982.136958429" calcext:value-type="float">
            <text:p>543982.14</text:p>
          </table:table-cell>
          <table:table-cell table:style-name="ce54" table:formula="of:=MULTIPLE.OPERATIONS([.G$20];[.$F$6];[.$E27])" office:value-type="percentage" office:value="0.292272630570958" calcext:value-type="percentage">
            <text:p>29.23 %</text:p>
          </table:table-cell>
          <table:table-cell table:style-name="ce61" office:value-type="float" office:value="437873.556440755" calcext:value-type="float">
            <text:p>437873.6</text:p>
          </table:table-cell>
          <table:table-cell table:style-name="ce54" office:value-type="percentage" office:value="0.266962777713925" calcext:value-type="percentage">
            <text:p>26.70 %</text:p>
          </table:table-cell>
          <table:table-cell/>
          <table:table-cell table:style-name="ce27" table:formula="of:=+[.$K$26]*(1+[.L27])" office:value-type="float" office:value="11.487593220339" calcext:value-type="float">
            <text:p>11.49</text:p>
          </table:table-cell>
          <table:table-cell table:style-name="ce36" table:formula="of:=+[.L26]+0.04" office:value-type="percentage" office:value="0.04" calcext:value-type="percentage">
            <text:p>4.0%</text:p>
          </table:table-cell>
          <table:table-cell table:style-name="ce75" table:formula="of:=MULTIPLE.OPERATIONS([.M$20];[.$F$7];[.$L27])" office:value-type="float" office:value="527628.31595183" calcext:value-type="float">
            <text:p>527628.31595183</text:p>
          </table:table-cell>
          <table:table-cell table:style-name="ce54" table:formula="of:=MULTIPLE.OPERATIONS([.N$20];[.$F$7];[.$L27])" office:value-type="percentage" office:value="0.288439863547561" calcext:value-type="percentage">
            <text:p>28.84 %</text:p>
          </table:table-cell>
          <table:table-cell table:style-name="ce83" office:value-type="float" office:value="421519.735434156" calcext:value-type="float">
            <text:p>S/ 421,519.7</text:p>
          </table:table-cell>
          <table:table-cell table:style-name="ce54" office:value-type="percentage" office:value="0.263049454941198" calcext:value-type="percentage">
            <text:p>26.30 %</text:p>
          </table:table-cell>
          <table:table-cell table:style-name="ce93" table:number-columns-repeated="2"/>
          <table:table-cell/>
          <table:table-cell table:style-name="ce29" table:formula="of:=+[.$T$26]*(1+[.U27])" office:value-type="float" office:value="14.7992705084746" calcext:value-type="float">
            <text:p>14.8</text:p>
          </table:table-cell>
          <table:table-cell table:style-name="ce36" table:formula="of:=+[.U26]+0.04" office:value-type="percentage" office:value="0.04" calcext:value-type="percentage">
            <text:p>4.0%</text:p>
          </table:table-cell>
          <table:table-cell table:style-name="ce101" table:formula="of:=MULTIPLE.OPERATIONS([.V$20];[.$F$8];[.$U27])" office:value-type="float" office:value="399530.229263608" calcext:value-type="float">
            <text:p>399,530.2</text:p>
          </table:table-cell>
          <table:table-cell table:style-name="ce54" table:formula="of:=MULTIPLE.OPERATIONS([.W$20];[.$F$8];[.$U27])" office:value-type="percentage" office:value="0.242656037226626" calcext:value-type="percentage">
            <text:p>24.27 %</text:p>
          </table:table-cell>
          <table:table-cell table:style-name="ce105" office:value-type="float" office:value="373383.443180158" calcext:value-type="float">
            <text:p>S/ 373,383.4</text:p>
          </table:table-cell>
          <table:table-cell table:style-name="ce54" office:value-type="percentage" office:value="0.251666134134539" calcext:value-type="percentage">
            <text:p>25.17 %</text:p>
          </table:table-cell>
          <table:table-cell table:number-columns-repeated="16359"/>
        </table:table-row>
        <table:table-row table:style-name="ro1">
          <table:table-cell table:number-columns-repeated="3"/>
          <table:table-cell table:style-name="ce27" table:formula="of:=+[.$D$26]*(1+[.E28])" office:value-type="float" office:value="11.8891525423729" calcext:value-type="float">
            <text:p>11.89</text:p>
          </table:table-cell>
          <table:table-cell table:style-name="ce36" table:formula="of:=+[.E27]+0.04" office:value-type="percentage" office:value="0.08" calcext:value-type="percentage">
            <text:p>8.0%</text:p>
          </table:table-cell>
          <table:table-cell table:style-name="ce46" table:formula="of:=MULTIPLE.OPERATIONS([.F$20];[.$F$6];[.$E28])" office:value-type="float" office:value="624464.609105869" calcext:value-type="float">
            <text:p>624464.61</text:p>
          </table:table-cell>
          <table:table-cell table:style-name="ce54" table:formula="of:=MULTIPLE.OPERATIONS([.G$20];[.$F$6];[.$E28])" office:value-type="percentage" office:value="0.310698280612796" calcext:value-type="percentage">
            <text:p>31.07 %</text:p>
          </table:table-cell>
          <table:table-cell table:style-name="ce61" office:value-type="float" office:value="518356.028588196" calcext:value-type="float">
            <text:p>518356.0</text:p>
          </table:table-cell>
          <table:table-cell table:style-name="ce54" office:value-type="percentage" office:value="0.285808095486858" calcext:value-type="percentage">
            <text:p>28.58 %</text:p>
          </table:table-cell>
          <table:table-cell/>
          <table:table-cell table:style-name="ce27" table:formula="of:=+[.$K$26]*(1+[.L28])" office:value-type="float" office:value="11.9294237288136" calcext:value-type="float">
            <text:p>11.93</text:p>
          </table:table-cell>
          <table:table-cell table:style-name="ce36" table:formula="of:=+[.L27]+0.04" office:value-type="percentage" office:value="0.08" calcext:value-type="percentage">
            <text:p>8.0%</text:p>
          </table:table-cell>
          <table:table-cell table:style-name="ce75" table:formula="of:=MULTIPLE.OPERATIONS([.M$20];[.$F$7];[.$L28])" office:value-type="float" office:value="591756.967092673" calcext:value-type="float">
            <text:p>591756.967092673</text:p>
          </table:table-cell>
          <table:table-cell table:style-name="ce54" table:formula="of:=MULTIPLE.OPERATIONS([.N$20];[.$F$7];[.$L28])" office:value-type="percentage" office:value="0.303092474146859" calcext:value-type="percentage">
            <text:p>30.31 %</text:p>
          </table:table-cell>
          <table:table-cell table:style-name="ce83" office:value-type="float" office:value="485648.386574999" calcext:value-type="float">
            <text:p>S/ 485,648.4</text:p>
          </table:table-cell>
          <table:table-cell table:style-name="ce54" office:value-type="percentage" office:value="0.278061439486876" calcext:value-type="percentage">
            <text:p>27.81 %</text:p>
          </table:table-cell>
          <table:table-cell table:style-name="ce93" table:number-columns-repeated="2"/>
          <table:table-cell/>
          <table:table-cell table:style-name="ce29" table:formula="of:=+[.$T$26]*(1+[.U28])" office:value-type="float" office:value="15.368473220339" calcext:value-type="float">
            <text:p>15.4</text:p>
          </table:table-cell>
          <table:table-cell table:style-name="ce36" table:formula="of:=+[.U27]+0.04" office:value-type="percentage" office:value="0.08" calcext:value-type="percentage">
            <text:p>8.0%</text:p>
          </table:table-cell>
          <table:table-cell table:style-name="ce101" table:formula="of:=MULTIPLE.OPERATIONS([.V$20];[.$F$8];[.$U28])" office:value-type="float" office:value="415522.588150453" calcext:value-type="float">
            <text:p>415,522.6</text:p>
          </table:table-cell>
          <table:table-cell table:style-name="ce54" table:formula="of:=MULTIPLE.OPERATIONS([.W$20];[.$F$8];[.$U28])" office:value-type="percentage" office:value="0.246457939406342" calcext:value-type="percentage">
            <text:p>24.65 %</text:p>
          </table:table-cell>
          <table:table-cell table:style-name="ce105" office:value-type="float" office:value="389375.802067003" calcext:value-type="float">
            <text:p>S/ 389,375.8</text:p>
          </table:table-cell>
          <table:table-cell table:style-name="ce54" office:value-type="percentage" office:value="0.255475154323916" calcext:value-type="percentage">
            <text:p>25.55 %</text:p>
          </table:table-cell>
          <table:table-cell table:number-columns-repeated="16359"/>
        </table:table-row>
        <table:table-row table:style-name="ro1">
          <table:table-cell table:number-columns-repeated="3"/>
          <table:table-cell table:style-name="ce27" table:formula="of:=+[.$D$26]*(1+[.E29])" office:value-type="float" office:value="12.3294915254237" calcext:value-type="float">
            <text:p>12.33</text:p>
          </table:table-cell>
          <table:table-cell table:style-name="ce36" table:formula="of:=+[.E28]+0.04" office:value-type="percentage" office:value="0.12" calcext:value-type="percentage">
            <text:p>12.0%</text:p>
          </table:table-cell>
          <table:table-cell table:style-name="ce46" table:formula="of:=MULTIPLE.OPERATIONS([.F$20];[.$F$6];[.$E29])" office:value-type="float" office:value="704947.081253311" calcext:value-type="float">
            <text:p>704947.08</text:p>
          </table:table-cell>
          <table:table-cell table:style-name="ce54" table:formula="of:=MULTIPLE.OPERATIONS([.G$20];[.$F$6];[.$E29])" office:value-type="percentage" office:value="0.328940975118041" calcext:value-type="percentage">
            <text:p>32.89 %</text:p>
          </table:table-cell>
          <table:table-cell table:style-name="ce61" office:value-type="float" office:value="598838.500735637" calcext:value-type="float">
            <text:p>598838.5</text:p>
          </table:table-cell>
          <table:table-cell table:style-name="ce54" office:value-type="percentage" office:value="0.30441783846415" calcext:value-type="percentage">
            <text:p>30.44 %</text:p>
          </table:table-cell>
          <table:table-cell/>
          <table:table-cell table:style-name="ce27" table:formula="of:=+[.$K$26]*(1+[.L29])" office:value-type="float" office:value="12.3712542372881" calcext:value-type="float">
            <text:p>12.37</text:p>
          </table:table-cell>
          <table:table-cell table:style-name="ce36" table:formula="of:=+[.L28]+0.04" office:value-type="percentage" office:value="0.12" calcext:value-type="percentage">
            <text:p>12.0%</text:p>
          </table:table-cell>
          <table:table-cell table:style-name="ce75" table:formula="of:=MULTIPLE.OPERATIONS([.M$20];[.$F$7];[.$L29])" office:value-type="float" office:value="655885.618233515" calcext:value-type="float">
            <text:p>655885.618233515</text:p>
          </table:table-cell>
          <table:table-cell table:style-name="ce54" table:formula="of:=MULTIPLE.OPERATIONS([.N$20];[.$F$7];[.$L29])" office:value-type="percentage" office:value="0.317608087277462" calcext:value-type="percentage">
            <text:p>31.76 %</text:p>
          </table:table-cell>
          <table:table-cell table:style-name="ce83" office:value-type="float" office:value="549777.037715842" calcext:value-type="float">
            <text:p>S/ 549,777.0</text:p>
          </table:table-cell>
          <table:table-cell table:style-name="ce54" office:value-type="percentage" office:value="0.292900788455926" calcext:value-type="percentage">
            <text:p>29.29 %</text:p>
          </table:table-cell>
          <table:table-cell table:style-name="ce93" table:number-columns-repeated="2"/>
          <table:table-cell/>
          <table:table-cell table:style-name="ce29" table:formula="of:=+[.$T$26]*(1+[.U29])" office:value-type="float" office:value="15.9376759322034" calcext:value-type="float">
            <text:p>15.9</text:p>
          </table:table-cell>
          <table:table-cell table:style-name="ce36" table:formula="of:=+[.U28]+0.04" office:value-type="percentage" office:value="0.12" calcext:value-type="percentage">
            <text:p>12.0%</text:p>
          </table:table-cell>
          <table:table-cell table:style-name="ce101" table:formula="of:=MULTIPLE.OPERATIONS([.V$20];[.$F$8];[.$U29])" office:value-type="float" office:value="431514.947037298" calcext:value-type="float">
            <text:p>431,514.9</text:p>
          </table:table-cell>
          <table:table-cell table:style-name="ce54" table:formula="of:=MULTIPLE.OPERATIONS([.W$20];[.$F$8];[.$U29])" office:value-type="percentage" office:value="0.250247861057829" calcext:value-type="percentage">
            <text:p>25.02 %</text:p>
          </table:table-cell>
          <table:table-cell table:style-name="ce105" office:value-type="float" office:value="405368.160953848" calcext:value-type="float">
            <text:p>S/ 405,368.2</text:p>
          </table:table-cell>
          <table:table-cell table:style-name="ce54" office:value-type="percentage" office:value="0.259272353510756" calcext:value-type="percentage">
            <text:p>25.93 %</text:p>
          </table:table-cell>
          <table:table-cell table:number-columns-repeated="16359"/>
        </table:table-row>
        <table:table-row table:style-name="ro1">
          <table:table-cell table:number-columns-repeated="3"/>
          <table:table-cell table:style-name="ce27" table:formula="of:=+[.$D$26]*(1+[.E30])" office:value-type="float" office:value="12.7698305084746" calcext:value-type="float">
            <text:p>12.77</text:p>
          </table:table-cell>
          <table:table-cell table:style-name="ce36" table:formula="of:=+[.E29]+0.04" office:value-type="percentage" office:value="0.16" calcext:value-type="percentage">
            <text:p>16.0%</text:p>
          </table:table-cell>
          <table:table-cell table:style-name="ce46" table:formula="of:=MULTIPLE.OPERATIONS([.F$20];[.$F$6];[.$E30])" office:value-type="float" office:value="785429.553400751" calcext:value-type="float">
            <text:p>785429.55</text:p>
          </table:table-cell>
          <table:table-cell table:style-name="ce54" table:formula="of:=MULTIPLE.OPERATIONS([.G$20];[.$F$6];[.$E30])" office:value-type="percentage" office:value="0.347026969043422" calcext:value-type="percentage">
            <text:p>34.70 %</text:p>
          </table:table-cell>
          <table:table-cell table:style-name="ce61" office:value-type="float" office:value="679320.972883078" calcext:value-type="float">
            <text:p>679321.0</text:p>
          </table:table-cell>
          <table:table-cell table:style-name="ce54" office:value-type="percentage" office:value="0.322824400401516" calcext:value-type="percentage">
            <text:p>32.28 %</text:p>
          </table:table-cell>
          <table:table-cell/>
          <table:table-cell table:style-name="ce27" table:formula="of:=+[.$K$26]*(1+[.L30])" office:value-type="float" office:value="12.8130847457627" calcext:value-type="float">
            <text:p>12.81</text:p>
          </table:table-cell>
          <table:table-cell table:style-name="ce36" table:formula="of:=+[.L29]+0.04" office:value-type="percentage" office:value="0.16" calcext:value-type="percentage">
            <text:p>16.0%</text:p>
          </table:table-cell>
          <table:table-cell table:style-name="ce75" table:formula="of:=MULTIPLE.OPERATIONS([.M$20];[.$F$7];[.$L30])" office:value-type="float" office:value="720014.269374358" calcext:value-type="float">
            <text:p>720014.269374358</text:p>
          </table:table-cell>
          <table:table-cell table:style-name="ce54" table:formula="of:=MULTIPLE.OPERATIONS([.N$20];[.$F$7];[.$L30])" office:value-type="percentage" office:value="0.3320011058736" calcext:value-type="percentage">
            <text:p>33.20 %</text:p>
          </table:table-cell>
          <table:table-cell table:style-name="ce83" office:value-type="float" office:value="613905.688856684" calcext:value-type="float">
            <text:p>S/ 613,905.7</text:p>
          </table:table-cell>
          <table:table-cell table:style-name="ce54" office:value-type="percentage" office:value="0.307585361588322" calcext:value-type="percentage">
            <text:p>30.76 %</text:p>
          </table:table-cell>
          <table:table-cell table:style-name="ce93" table:number-columns-repeated="2"/>
          <table:table-cell/>
          <table:table-cell table:style-name="ce29" table:formula="of:=+[.$T$26]*(1+[.U30])" office:value-type="float" office:value="16.5068786440678" calcext:value-type="float">
            <text:p>16.5</text:p>
          </table:table-cell>
          <table:table-cell table:style-name="ce36" table:formula="of:=+[.U29]+0.04" office:value-type="percentage" office:value="0.16" calcext:value-type="percentage">
            <text:p>16.0%</text:p>
          </table:table-cell>
          <table:table-cell table:style-name="ce101" table:formula="of:=MULTIPLE.OPERATIONS([.V$20];[.$F$8];[.$U30])" office:value-type="float" office:value="447507.305924142" calcext:value-type="float">
            <text:p>447,507.3</text:p>
          </table:table-cell>
          <table:table-cell table:style-name="ce54" table:formula="of:=MULTIPLE.OPERATIONS([.W$20];[.$F$8];[.$U30])" office:value-type="percentage" office:value="0.254026137444962" calcext:value-type="percentage">
            <text:p>25.40 %</text:p>
          </table:table-cell>
          <table:table-cell table:style-name="ce105" office:value-type="float" office:value="421360.519840692" calcext:value-type="float">
            <text:p>S/ 421,360.5</text:p>
          </table:table-cell>
          <table:table-cell table:style-name="ce54" office:value-type="percentage" office:value="0.263058063670192" calcext:value-type="percentage">
            <text:p>26.31 %</text:p>
          </table:table-cell>
          <table:table-cell table:number-columns-repeated="16359"/>
        </table:table-row>
        <table:table-row table:style-name="ro1">
          <table:table-cell table:number-columns-repeated="3"/>
          <table:table-cell table:style-name="ce27" table:formula="of:=+[.$D$26]*(1+[.E31])" office:value-type="float" office:value="13.2101694915254" calcext:value-type="float">
            <text:p>13.21</text:p>
          </table:table-cell>
          <table:table-cell table:style-name="ce36" table:formula="of:=+[.E30]+0.04" office:value-type="percentage" office:value="0.2" calcext:value-type="percentage">
            <text:p>20.0%</text:p>
          </table:table-cell>
          <table:table-cell table:style-name="ce46" table:formula="of:=MULTIPLE.OPERATIONS([.F$20];[.$F$6];[.$E31])" office:value-type="float" office:value="865912.025548192" calcext:value-type="float">
            <text:p>865912.03</text:p>
          </table:table-cell>
          <table:table-cell table:style-name="ce54" table:formula="of:=MULTIPLE.OPERATIONS([.G$20];[.$F$6];[.$E31])" office:value-type="percentage" office:value="0.364979557378972" calcext:value-type="percentage">
            <text:p>36.50 %</text:p>
          </table:table-cell>
          <table:table-cell table:style-name="ce61" office:value-type="float" office:value="759803.445030519" calcext:value-type="float">
            <text:p>759803.4</text:p>
          </table:table-cell>
          <table:table-cell table:style-name="ce54" office:value-type="percentage" office:value="0.34105631768707" calcext:value-type="percentage">
            <text:p>34.11 %</text:p>
          </table:table-cell>
          <table:table-cell/>
          <table:table-cell table:style-name="ce27" table:formula="of:=+[.$K$26]*(1+[.L31])" office:value-type="float" office:value="13.2549152542373" calcext:value-type="float">
            <text:p>13.25</text:p>
          </table:table-cell>
          <table:table-cell table:style-name="ce36" table:formula="of:=+[.L30]+0.04" office:value-type="percentage" office:value="0.2" calcext:value-type="percentage">
            <text:p>20.0%</text:p>
          </table:table-cell>
          <table:table-cell table:style-name="ce75" table:formula="of:=MULTIPLE.OPERATIONS([.M$20];[.$F$7];[.$L31])" office:value-type="float" office:value="784142.9205152" calcext:value-type="float">
            <text:p>784142.9205152</text:p>
          </table:table-cell>
          <table:table-cell table:style-name="ce54" table:formula="of:=MULTIPLE.OPERATIONS([.N$20];[.$F$7];[.$L31])" office:value-type="percentage" office:value="0.34628458457093" calcext:value-type="percentage">
            <text:p>34.63 %</text:p>
          </table:table-cell>
          <table:table-cell table:style-name="ce83" office:value-type="float" office:value="678034.339997527" calcext:value-type="float">
            <text:p>S/ 678,034.3</text:p>
          </table:table-cell>
          <table:table-cell table:style-name="ce54" office:value-type="percentage" office:value="0.322131248554205" calcext:value-type="percentage">
            <text:p>32.21 %</text:p>
          </table:table-cell>
          <table:table-cell table:style-name="ce93" table:number-columns-repeated="2"/>
          <table:table-cell/>
          <table:table-cell table:style-name="ce29" table:formula="of:=+[.$T$26]*(1+[.U31])" office:value-type="float" office:value="17.0760813559322" calcext:value-type="float">
            <text:p>17.1</text:p>
          </table:table-cell>
          <table:table-cell table:style-name="ce36" table:formula="of:=+[.U30]+0.04" office:value-type="percentage" office:value="0.2" calcext:value-type="percentage">
            <text:p>20.0%</text:p>
          </table:table-cell>
          <table:table-cell table:style-name="ce101" table:formula="of:=MULTIPLE.OPERATIONS([.V$20];[.$F$8];[.$U31])" office:value-type="float" office:value="463499.664810987" calcext:value-type="float">
            <text:p>463,499.7</text:p>
          </table:table-cell>
          <table:table-cell table:style-name="ce54" table:formula="of:=MULTIPLE.OPERATIONS([.W$20];[.$F$8];[.$U31])" office:value-type="percentage" office:value="0.257793094815619" calcext:value-type="percentage">
            <text:p>25.78 %</text:p>
          </table:table-cell>
          <table:table-cell table:style-name="ce105" office:value-type="float" office:value="437352.878727537" calcext:value-type="float">
            <text:p>S/ 437,352.9</text:p>
          </table:table-cell>
          <table:table-cell table:style-name="ce54" office:value-type="percentage" office:value="0.266832607803779" calcext:value-type="percentage">
            <text:p>26.68 %</text:p>
          </table:table-cell>
          <table:table-cell table:number-columns-repeated="16359"/>
        </table:table-row>
        <table:table-row table:style-name="ro1" table:number-rows-repeated="2">
          <table:table-cell table:number-columns-repeated="16"/>
          <table:table-cell table:style-name="ce94" table:number-columns-repeated="2"/>
          <table:table-cell table:number-columns-repeated="16366"/>
        </table:table-row>
        <table:table-row table:style-name="ro1">
          <table:table-cell table:number-columns-repeated="3"/>
          <table:table-cell table:style-name="ce24" office:value-type="string" calcext:value-type="string" table:number-columns-spanned="6" table:number-rows-spanned="1">
            <text:p>Sensibilidad del valor de compra de Diesel B5</text:p>
          </table:table-cell>
          <table:covered-table-cell table:number-columns-repeated="5" table:style-name="ce24"/>
          <table:table-cell/>
          <table:table-cell table:style-name="ce24" office:value-type="string" calcext:value-type="string" table:number-columns-spanned="6" table:number-rows-spanned="1">
            <text:p>Sensibilidad del valor de compra de Gasohol 90</text:p>
          </table:table-cell>
          <table:covered-table-cell table:number-columns-repeated="5" table:style-name="ce24"/>
          <table:table-cell table:style-name="ce95" table:number-columns-repeated="2"/>
          <table:table-cell/>
          <table:table-cell table:style-name="ce24" office:value-type="string" calcext:value-type="string" table:number-columns-spanned="6" table:number-rows-spanned="1">
            <text:p>Sensibilidad del valor de compra de Gasohol 95</text:p>
          </table:table-cell>
          <table:covered-table-cell table:number-columns-repeated="5" table:style-name="ce24"/>
          <table:table-cell table:number-columns-repeated="16359"/>
        </table:table-row>
        <table:table-row table:style-name="ro1">
          <table:table-cell table:number-columns-repeated="3"/>
          <table:table-cell table:style-name="ce25" office:value-type="string" calcext:value-type="string">
            <text:p>V. Venta</text:p>
          </table:table-cell>
          <table:table-cell table:style-name="ce25" office:value-type="string" calcext:value-type="string">
            <text:p>Var. porc.</text:p>
          </table:table-cell>
          <table:table-cell table:style-name="ce25" office:value-type="string" calcext:value-type="string">
            <text:p>VANE </text:p>
          </table:table-cell>
          <table:table-cell table:style-name="ce25" office:value-type="string" calcext:value-type="string">
            <text:p>TIRE</text:p>
          </table:table-cell>
          <table:table-cell table:style-name="ce25" office:value-type="string" calcext:value-type="string">
            <text:p>VANF</text:p>
          </table:table-cell>
          <table:table-cell table:style-name="ce25" office:value-type="string" calcext:value-type="string">
            <text:p>TIRF</text:p>
          </table:table-cell>
          <table:table-cell/>
          <table:table-cell table:style-name="ce23" office:value-type="string" calcext:value-type="string">
            <text:p>V. Venta</text:p>
          </table:table-cell>
          <table:table-cell table:style-name="ce23" office:value-type="string" calcext:value-type="string">
            <text:p>Var. porc.</text:p>
          </table:table-cell>
          <table:table-cell table:style-name="ce25" office:value-type="string" calcext:value-type="string">
            <text:p>VANE </text:p>
          </table:table-cell>
          <table:table-cell table:style-name="ce25" office:value-type="string" calcext:value-type="string">
            <text:p>TIRE</text:p>
          </table:table-cell>
          <table:table-cell table:style-name="ce25" office:value-type="string" calcext:value-type="string">
            <text:p>VANF</text:p>
          </table:table-cell>
          <table:table-cell table:style-name="ce25" office:value-type="string" calcext:value-type="string">
            <text:p>TIRF</text:p>
          </table:table-cell>
          <table:table-cell table:style-name="ce96" table:number-columns-repeated="2"/>
          <table:table-cell/>
          <table:table-cell table:style-name="ce23" office:value-type="string" calcext:value-type="string">
            <text:p>V. Venta</text:p>
          </table:table-cell>
          <table:table-cell table:style-name="ce23" office:value-type="string" calcext:value-type="string">
            <text:p>Var. porc.</text:p>
          </table:table-cell>
          <table:table-cell table:style-name="ce25" office:value-type="string" calcext:value-type="string">
            <text:p>VANE </text:p>
          </table:table-cell>
          <table:table-cell table:style-name="ce25" office:value-type="string" calcext:value-type="string">
            <text:p>TIRE</text:p>
          </table:table-cell>
          <table:table-cell table:style-name="ce25" office:value-type="string" calcext:value-type="string">
            <text:p>VANF</text:p>
          </table:table-cell>
          <table:table-cell table:style-name="ce25" office:value-type="string" calcext:value-type="string">
            <text:p>TIRF</text:p>
          </table:table-cell>
          <table:table-cell table:number-columns-repeated="16359"/>
        </table:table-row>
        <table:table-row table:style-name="ro1">
          <table:table-cell table:number-columns-repeated="3"/>
          <table:table-cell table:style-name="ce26"/>
          <table:table-cell table:style-name="ce35"/>
          <table:table-cell table:style-name="ce45" table:formula="of:=+[$Rentabilidad.C11]" office:value-type="float" office:value="463499.664810987" calcext:value-type="float">
            <text:p>463499.66</text:p>
          </table:table-cell>
          <table:table-cell table:style-name="ce56" table:formula="of:=+[$Rentabilidad.C13]" office:value-type="percentage" office:value="0.273634324908836" calcext:value-type="percentage">
            <text:p>27.36 %</text:p>
          </table:table-cell>
          <table:table-cell table:style-name="ce60" table:formula="of:=+[$Rentabilidad.C23]" office:value-type="float" office:value="504085.186566147" calcext:value-type="float">
            <text:p>504085.2</text:p>
          </table:table-cell>
          <table:table-cell table:style-name="ce56" table:formula="of:=+[$Rentabilidad.C25]" office:value-type="percentage" office:value="0.282726593166351" calcext:value-type="percentage">
            <text:p>28.27 %</text:p>
          </table:table-cell>
          <table:table-cell/>
          <table:table-cell table:style-name="ce69" table:number-columns-repeated="2"/>
          <table:table-cell table:style-name="ce74" table:formula="of:=+[$Rentabilidad.C11]" office:value-type="float" office:value="463499.664810987" calcext:value-type="float">
            <text:p>463,500</text:p>
          </table:table-cell>
          <table:table-cell table:style-name="ce81" table:formula="of:=+[$Rentabilidad.C13]" office:value-type="percentage" office:value="0.273634324908836" calcext:value-type="percentage">
            <text:p>27.36 %</text:p>
          </table:table-cell>
          <table:table-cell table:style-name="ce82" table:formula="of:=+[$Rentabilidad.C23]" office:value-type="float" office:value="504085.186566147" calcext:value-type="float">
            <text:p>S/ 504,085.2</text:p>
          </table:table-cell>
          <table:table-cell table:style-name="ce81" table:formula="of:=+[$Rentabilidad.C25]" office:value-type="percentage" office:value="0.282726593166351" calcext:value-type="percentage">
            <text:p>28.27 %</text:p>
          </table:table-cell>
          <table:table-cell table:style-name="ce93" table:number-columns-repeated="2"/>
          <table:table-cell/>
          <table:table-cell table:style-name="ce69" table:number-columns-repeated="2"/>
          <table:table-cell table:style-name="ce100" table:formula="of:=+[$Rentabilidad.C11]" office:value-type="float" office:value="316805.562538153" calcext:value-type="float">
            <text:p>316,805.6</text:p>
          </table:table-cell>
          <table:table-cell table:style-name="ce81" table:formula="of:=+[$Rentabilidad.C13]" office:value-type="percentage" office:value="0.238841809921468" calcext:value-type="percentage">
            <text:p>23.88 %</text:p>
          </table:table-cell>
          <table:table-cell table:style-name="ce82" table:formula="of:=+[$Rentabilidad.C23]" office:value-type="float" office:value="504085.186566147" calcext:value-type="float">
            <text:p>S/ 504,085.2</text:p>
          </table:table-cell>
          <table:table-cell table:style-name="ce81" table:formula="of:=+[$Rentabilidad.C25]" office:value-type="percentage" office:value="0.282726593166351" calcext:value-type="percentage">
            <text:p>28.27 %</text:p>
          </table:table-cell>
          <table:table-cell table:number-columns-repeated="16359"/>
        </table:table-row>
        <table:table-row table:style-name="ro1">
          <table:table-cell table:number-columns-repeated="3"/>
          <table:table-cell table:style-name="ce29" table:formula="of:=+[.$D$42]*(1+[.E37])" office:value-type="float" office:value="6.45846421385713" calcext:value-type="float">
            <text:p>6.5</text:p>
          </table:table-cell>
          <table:table-cell table:style-name="ce36" table:formula="of:=+[.E38]-0.04" office:value-type="percentage" office:value="-0.198592168636478" calcext:value-type="percentage">
            <text:p>-19.9%</text:p>
          </table:table-cell>
          <table:table-cell table:style-name="ce48" table:formula="of:=MULTIPLE.OPERATIONS([.F$36];[.$F$9];[.$E37])" office:value-type="float" office:value="762427.695287679" calcext:value-type="float">
            <text:p>762427.70</text:p>
          </table:table-cell>
          <table:table-cell table:style-name="ce54" table:formula="of:=MULTIPLE.OPERATIONS([.G$36];[.$F$9];[.$E37])" office:value-type="percentage" office:value="0.343526357049938" calcext:value-type="percentage">
            <text:p>34.35 %</text:p>
          </table:table-cell>
          <table:table-cell table:style-name="ce63" office:value-type="float" office:value="656319.114770005" calcext:value-type="float">
            <text:p>656319.1</text:p>
          </table:table-cell>
          <table:table-cell table:style-name="ce54" office:value-type="percentage" office:value="0.319042970543968" calcext:value-type="percentage">
            <text:p>31.90 %</text:p>
          </table:table-cell>
          <table:table-cell/>
          <table:table-cell table:style-name="ce29" table:formula="of:=+[.$K$42]*(1+[.L37])" office:value-type="float" office:value="6.31794043487278" calcext:value-type="float">
            <text:p>6.3</text:p>
          </table:table-cell>
          <table:table-cell table:style-name="ce36" table:formula="of:=+[.L38]-0.04" office:value-type="percentage" office:value="-0.22912111331301" calcext:value-type="percentage">
            <text:p>-22.9%</text:p>
          </table:table-cell>
          <table:table-cell table:style-name="ce77" table:formula="of:=MULTIPLE.OPERATIONS([.M$36];[.$F$10];[.$L37])" office:value-type="float" office:value="742017.706546531" calcext:value-type="float">
            <text:p>742017.71</text:p>
          </table:table-cell>
          <table:table-cell table:style-name="ce54" table:formula="of:=MULTIPLE.OPERATIONS([.N$36];[.$F$10];[.$L37])" office:value-type="percentage" office:value="0.33840329630719" calcext:value-type="percentage">
            <text:p>33.84 %</text:p>
          </table:table-cell>
          <table:table-cell table:style-name="ce85" office:value-type="float" office:value="635909.126028858" calcext:value-type="float">
            <text:p>S/ 635,909.1</text:p>
          </table:table-cell>
          <table:table-cell table:style-name="ce54" office:value-type="percentage" office:value="0.313901906689448" calcext:value-type="percentage">
            <text:p>31.39 %</text:p>
          </table:table-cell>
          <table:table-cell table:style-name="ce93" table:number-columns-repeated="2"/>
          <table:table-cell/>
          <table:table-cell table:style-name="ce29" table:formula="of:=+[.$T$42]*(1+[.U37])" office:value-type="float" office:value="5.02346290080444" calcext:value-type="float">
            <text:p>5.0</text:p>
          </table:table-cell>
          <table:table-cell table:style-name="ce36" table:formula="of:=+[.U38]-0.04" office:value-type="percentage" office:value="-0.22912111331301" calcext:value-type="percentage">
            <text:p>-22.9%</text:p>
          </table:table-cell>
          <table:table-cell table:style-name="ce103" table:formula="of:=MULTIPLE.OPERATIONS([.V$36];[.$F$11];[.$U37])" office:value-type="float" office:value="383537.870376764" calcext:value-type="float">
            <text:p>383,537.9</text:p>
          </table:table-cell>
          <table:table-cell table:style-name="ce54" table:formula="of:=MULTIPLE.OPERATIONS([.W$36];[.$F$11];[.$U37])" office:value-type="percentage" office:value="0.254879237269735" calcext:value-type="percentage">
            <text:p>25.49 %</text:p>
          </table:table-cell>
          <table:table-cell table:style-name="ce107" office:value-type="float" office:value="424123.392131924" calcext:value-type="float">
            <text:p>S/ 424,123.4</text:p>
          </table:table-cell>
          <table:table-cell table:style-name="ce54" office:value-type="percentage" office:value="0.263932084231872" calcext:value-type="percentage">
            <text:p>26.39 %</text:p>
          </table:table-cell>
          <table:table-cell table:number-columns-repeated="16359"/>
        </table:table-row>
        <table:table-row table:style-name="ro1">
          <table:table-cell table:number-columns-repeated="3"/>
          <table:table-cell table:style-name="ce29" table:formula="of:=+[.$D$42]*(1+[.E38])" office:value-type="float" office:value="6.78082014606052" calcext:value-type="float">
            <text:p>6.8</text:p>
          </table:table-cell>
          <table:table-cell table:style-name="ce36" table:formula="of:=+[.E39]-0.04" office:value-type="percentage" office:value="-0.158592168636478" calcext:value-type="percentage">
            <text:p>-15.9%</text:p>
          </table:table-cell>
          <table:table-cell table:style-name="ce48" table:formula="of:=MULTIPLE.OPERATIONS([.F$36];[.$F$9];[.$E38])" office:value-type="float" office:value="702218.265574692" calcext:value-type="float">
            <text:p>702218.27</text:p>
          </table:table-cell>
          <table:table-cell table:style-name="ce54" table:formula="of:=MULTIPLE.OPERATIONS([.G$36];[.$F$9];[.$E38])" office:value-type="percentage" office:value="0.329554027740223" calcext:value-type="percentage">
            <text:p>32.96 %</text:p>
          </table:table-cell>
          <table:table-cell table:style-name="ce63" office:value-type="float" office:value="596109.685057018" calcext:value-type="float">
            <text:p>596109.7</text:p>
          </table:table-cell>
          <table:table-cell table:style-name="ce54" office:value-type="percentage" office:value="0.304861723701777" calcext:value-type="percentage">
            <text:p>30.49 %</text:p>
          </table:table-cell>
          <table:table-cell/>
          <table:table-cell table:style-name="ce29" table:formula="of:=+[.$K$42]*(1+[.L38])" office:value-type="float" office:value="6.64577094334736" calcext:value-type="float">
            <text:p>6.6</text:p>
          </table:table-cell>
          <table:table-cell table:style-name="ce36" table:formula="of:=+[.L39]-0.04" office:value-type="percentage" office:value="-0.18912111331301" calcext:value-type="percentage">
            <text:p>-18.9%</text:p>
          </table:table-cell>
          <table:table-cell table:style-name="ce77" table:formula="of:=MULTIPLE.OPERATIONS([.M$36];[.$F$10];[.$L38])" office:value-type="float" office:value="693393.983013021" calcext:value-type="float">
            <text:p>693393.98</text:p>
          </table:table-cell>
          <table:table-cell table:style-name="ce54" table:formula="of:=MULTIPLE.OPERATIONS([.N$36];[.$F$10];[.$L38])" office:value-type="percentage" office:value="0.327200380501399" calcext:value-type="percentage">
            <text:p>32.72 %</text:p>
          </table:table-cell>
          <table:table-cell table:style-name="ce85" office:value-type="float" office:value="587285.402495348" calcext:value-type="float">
            <text:p>S/ 587,285.4</text:p>
          </table:table-cell>
          <table:table-cell table:style-name="ce54" office:value-type="percentage" office:value="0.302517195377561" calcext:value-type="percentage">
            <text:p>30.25 %</text:p>
          </table:table-cell>
          <table:table-cell table:style-name="ce93" table:number-columns-repeated="2"/>
          <table:table-cell/>
          <table:table-cell table:style-name="ce29" table:formula="of:=+[.$T$42]*(1+[.U38])" office:value-type="float" office:value="5.28412449045538" calcext:value-type="float">
            <text:p>5.3</text:p>
          </table:table-cell>
          <table:table-cell table:style-name="ce36" table:formula="of:=+[.U39]-0.04" office:value-type="percentage" office:value="-0.18912111331301" calcext:value-type="percentage">
            <text:p>-18.9%</text:p>
          </table:table-cell>
          <table:table-cell table:style-name="ce103" table:formula="of:=MULTIPLE.OPERATIONS([.V$36];[.$F$11];[.$U38])" office:value-type="float" office:value="371887.733578162" calcext:value-type="float">
            <text:p>371,887.7</text:p>
          </table:table-cell>
          <table:table-cell table:style-name="ce54" table:formula="of:=MULTIPLE.OPERATIONS([.W$36];[.$F$11];[.$U38])" office:value-type="percentage" office:value="0.25208970177113" calcext:value-type="percentage">
            <text:p>25.21 %</text:p>
          </table:table-cell>
          <table:table-cell table:style-name="ce107" office:value-type="float" office:value="412473.255333322" calcext:value-type="float">
            <text:p>S/ 412,473.3</text:p>
          </table:table-cell>
          <table:table-cell table:style-name="ce54" office:value-type="percentage" office:value="0.261133683341512" calcext:value-type="percentage">
            <text:p>26.11 %</text:p>
          </table:table-cell>
          <table:table-cell table:number-columns-repeated="16359"/>
        </table:table-row>
        <table:table-row table:style-name="ro1">
          <table:table-cell table:number-columns-repeated="3"/>
          <table:table-cell table:style-name="ce29" table:formula="of:=+[.$D$42]*(1+[.E39])" office:value-type="float" office:value="7.10317607826391" calcext:value-type="float">
            <text:p>7.1</text:p>
          </table:table-cell>
          <table:table-cell table:style-name="ce36" office:value-type="percentage" office:value="-0.118592168636478" calcext:value-type="percentage">
            <text:p>-11.9%</text:p>
          </table:table-cell>
          <table:table-cell table:style-name="ce48" table:formula="of:=MULTIPLE.OPERATIONS([.F$36];[.$F$9];[.$E39])" office:value-type="float" office:value="642008.835861705" calcext:value-type="float">
            <text:p>642008.84</text:p>
          </table:table-cell>
          <table:table-cell table:style-name="ce54" table:formula="of:=MULTIPLE.OPERATIONS([.G$36];[.$F$9];[.$E39])" office:value-type="percentage" office:value="0.315539171118385" calcext:value-type="percentage">
            <text:p>31.55 %</text:p>
          </table:table-cell>
          <table:table-cell table:style-name="ce63" office:value-type="float" office:value="535900.255344032" calcext:value-type="float">
            <text:p>535900.3</text:p>
          </table:table-cell>
          <table:table-cell table:style-name="ce54" office:value-type="percentage" office:value="0.290612897436785" calcext:value-type="percentage">
            <text:p>29.06 %</text:p>
          </table:table-cell>
          <table:table-cell/>
          <table:table-cell table:style-name="ce29" table:formula="of:=+[.$K$42]*(1+[.L39])" office:value-type="float" office:value="6.97360145182193" calcext:value-type="float">
            <text:p>7.0</text:p>
          </table:table-cell>
          <table:table-cell table:style-name="ce36" office:value-type="percentage" office:value="-0.14912111331301" calcext:value-type="percentage">
            <text:p>-14.9%</text:p>
          </table:table-cell>
          <table:table-cell table:style-name="ce77" table:formula="of:=MULTIPLE.OPERATIONS([.M$36];[.$F$10];[.$L39])" office:value-type="float" office:value="644770.259479512" calcext:value-type="float">
            <text:p>644770.26</text:p>
          </table:table-cell>
          <table:table-cell table:style-name="ce54" table:formula="of:=MULTIPLE.OPERATIONS([.N$36];[.$F$10];[.$L39])" office:value-type="percentage" office:value="0.315960346711547" calcext:value-type="percentage">
            <text:p>31.60 %</text:p>
          </table:table-cell>
          <table:table-cell table:style-name="ce85" office:value-type="float" office:value="538661.678961838" calcext:value-type="float">
            <text:p>S/ 538,661.7</text:p>
          </table:table-cell>
          <table:table-cell table:style-name="ce54" office:value-type="percentage" office:value="0.291078704476917" calcext:value-type="percentage">
            <text:p>29.11 %</text:p>
          </table:table-cell>
          <table:table-cell table:style-name="ce93" table:number-columns-repeated="2"/>
          <table:table-cell/>
          <table:table-cell table:style-name="ce29" table:formula="of:=+[.$T$42]*(1+[.U39])" office:value-type="float" office:value="5.54478608010632" calcext:value-type="float">
            <text:p>5.5</text:p>
          </table:table-cell>
          <table:table-cell table:style-name="ce36" office:value-type="percentage" office:value="-0.14912111331301" calcext:value-type="percentage">
            <text:p>-14.9%</text:p>
          </table:table-cell>
          <table:table-cell table:style-name="ce103" table:formula="of:=MULTIPLE.OPERATIONS([.V$36];[.$F$11];[.$U39])" office:value-type="float" office:value="360237.596779561" calcext:value-type="float">
            <text:p>360,237.6</text:p>
          </table:table-cell>
          <table:table-cell table:style-name="ce54" table:formula="of:=MULTIPLE.OPERATIONS([.W$36];[.$F$11];[.$U39])" office:value-type="percentage" office:value="0.249295959547348" calcext:value-type="percentage">
            <text:p>24.93 %</text:p>
          </table:table-cell>
          <table:table-cell table:style-name="ce107" office:value-type="float" office:value="400823.118534721" calcext:value-type="float">
            <text:p>S/ 400,823.1</text:p>
          </table:table-cell>
          <table:table-cell table:style-name="ce54" office:value-type="percentage" office:value="0.258331154264786" calcext:value-type="percentage">
            <text:p>25.83 %</text:p>
          </table:table-cell>
          <table:table-cell table:number-columns-repeated="16359"/>
        </table:table-row>
        <table:table-row table:style-name="ro1">
          <table:table-cell table:number-columns-repeated="3"/>
          <table:table-cell table:style-name="ce29" table:formula="of:=+[.$D$42]*(1+[.E40])" office:value-type="float" office:value="7.41418644067797" calcext:value-type="float">
            <text:p>7.4</text:p>
          </table:table-cell>
          <table:table-cell table:style-name="ce36" table:formula="of:=+[.E41]-0.04" office:value-type="percentage" office:value="-0.08" calcext:value-type="percentage">
            <text:p>-8.0%</text:p>
          </table:table-cell>
          <table:table-cell table:style-name="ce48" table:formula="of:=MULTIPLE.OPERATIONS([.F$36];[.$F$9];[.$E40])" office:value-type="float" office:value="583918.524236961" calcext:value-type="float">
            <text:p>583918.52</text:p>
          </table:table-cell>
          <table:table-cell table:style-name="ce54" table:formula="of:=MULTIPLE.OPERATIONS([.G$36];[.$F$9];[.$E40])" office:value-type="percentage" office:value="0.301967684507244" calcext:value-type="percentage">
            <text:p>30.20 %</text:p>
          </table:table-cell>
          <table:table-cell table:style-name="ce63" office:value-type="float" office:value="477809.943719287" calcext:value-type="float">
            <text:p>477809.9</text:p>
          </table:table-cell>
          <table:table-cell table:style-name="ce54" office:value-type="percentage" office:value="0.276789916954784" calcext:value-type="percentage">
            <text:p>27.68 %</text:p>
          </table:table-cell>
          <table:table-cell/>
          <table:table-cell table:style-name="ce29" table:formula="of:=+[.$K$42]*(1+[.L40])" office:value-type="float" office:value="7.54010169491526" calcext:value-type="float">
            <text:p>7.5</text:p>
          </table:table-cell>
          <table:table-cell table:style-name="ce36" table:formula="of:=+[.L41]-0.04" office:value-type="percentage" office:value="-0.08" calcext:value-type="percentage">
            <text:p>-8.0%</text:p>
          </table:table-cell>
          <table:table-cell table:style-name="ce77" table:formula="of:=MULTIPLE.OPERATIONS([.M$36];[.$F$10];[.$L40])" office:value-type="float" office:value="560747.111878007" calcext:value-type="float">
            <text:p>560747.11</text:p>
          </table:table-cell>
          <table:table-cell table:style-name="ce54" table:formula="of:=MULTIPLE.OPERATIONS([.N$36];[.$F$10];[.$L40])" office:value-type="percentage" office:value="0.296433649656791" calcext:value-type="percentage">
            <text:p>29.64 %</text:p>
          </table:table-cell>
          <table:table-cell table:style-name="ce85" office:value-type="float" office:value="454638.531360333" calcext:value-type="float">
            <text:p>S/ 454,638.5</text:p>
          </table:table-cell>
          <table:table-cell table:style-name="ce54" office:value-type="percentage" office:value="0.271166306711574" calcext:value-type="percentage">
            <text:p>27.12 %</text:p>
          </table:table-cell>
          <table:table-cell table:style-name="ce93" table:number-columns-repeated="2"/>
          <table:table-cell/>
          <table:table-cell table:style-name="ce29" table:formula="of:=+[.$T$42]*(1+[.U40])" office:value-type="float" office:value="5.99521656197162" calcext:value-type="float">
            <text:p>6.0</text:p>
          </table:table-cell>
          <table:table-cell table:style-name="ce36" table:formula="of:=+[.U41]-0.04" office:value-type="percentage" office:value="-0.08" calcext:value-type="percentage">
            <text:p>-8.0%</text:p>
          </table:table-cell>
          <table:table-cell table:style-name="ce103" table:formula="of:=MULTIPLE.OPERATIONS([.V$36];[.$F$11];[.$U40])" office:value-type="float" office:value="340105.836135356" calcext:value-type="float">
            <text:p>340,105.8</text:p>
          </table:table-cell>
          <table:table-cell table:style-name="ce54" table:formula="of:=MULTIPLE.OPERATIONS([.W$36];[.$F$11];[.$U40])" office:value-type="percentage" office:value="0.24445804727588" calcext:value-type="percentage">
            <text:p>24.45 %</text:p>
          </table:table-cell>
          <table:table-cell table:style-name="ce107" office:value-type="float" office:value="380691.357890516" calcext:value-type="float">
            <text:p>S/ 380,691.4</text:p>
          </table:table-cell>
          <table:table-cell table:style-name="ce54" office:value-type="percentage" office:value="0.253478245367331" calcext:value-type="percentage">
            <text:p>25.35 %</text:p>
          </table:table-cell>
          <table:table-cell table:number-columns-repeated="16359"/>
        </table:table-row>
        <table:table-row table:style-name="ro1">
          <table:table-cell table:number-columns-repeated="3"/>
          <table:table-cell table:style-name="ce29" table:formula="of:=+[.$D$42]*(1+[.E41])" office:value-type="float" office:value="7.73654237288136" calcext:value-type="float">
            <text:p>7.7</text:p>
          </table:table-cell>
          <table:table-cell table:style-name="ce36" table:formula="of:=+[.E42]-0.04" office:value-type="percentage" office:value="-0.04" calcext:value-type="percentage">
            <text:p>-4.0%</text:p>
          </table:table-cell>
          <table:table-cell table:style-name="ce48" table:formula="of:=MULTIPLE.OPERATIONS([.F$36];[.$F$9];[.$E41])" office:value-type="float" office:value="523709.094523974" calcext:value-type="float">
            <text:p>523709.09</text:p>
          </table:table-cell>
          <table:table-cell table:style-name="ce54" table:formula="of:=MULTIPLE.OPERATIONS([.G$36];[.$F$9];[.$E41])" office:value-type="percentage" office:value="0.28783868001012" calcext:value-type="percentage">
            <text:p>28.78 %</text:p>
          </table:table-cell>
          <table:table-cell table:style-name="ce63" office:value-type="float" office:value="417600.5140063" calcext:value-type="float">
            <text:p>417600.5</text:p>
          </table:table-cell>
          <table:table-cell table:style-name="ce54" office:value-type="percentage" office:value="0.262371213834859" calcext:value-type="percentage">
            <text:p>26.24 %</text:p>
          </table:table-cell>
          <table:table-cell/>
          <table:table-cell table:style-name="ce29" table:formula="of:=+[.$K$42]*(1+[.L41])" office:value-type="float" office:value="7.86793220338983" calcext:value-type="float">
            <text:p>7.9</text:p>
          </table:table-cell>
          <table:table-cell table:style-name="ce36" table:formula="of:=+[.L42]-0.04" office:value-type="percentage" office:value="-0.04" calcext:value-type="percentage">
            <text:p>-4.0%</text:p>
          </table:table-cell>
          <table:table-cell table:style-name="ce77" table:formula="of:=MULTIPLE.OPERATIONS([.M$36];[.$F$10];[.$L41])" office:value-type="float" office:value="512123.388344497" calcext:value-type="float">
            <text:p>512123.39</text:p>
          </table:table-cell>
          <table:table-cell table:style-name="ce54" table:formula="of:=MULTIPLE.OPERATIONS([.N$36];[.$F$10];[.$L41])" office:value-type="percentage" office:value="0.285063640530948" calcext:value-type="percentage">
            <text:p>28.51 %</text:p>
          </table:table-cell>
          <table:table-cell table:style-name="ce85" office:value-type="float" office:value="406014.807826823" calcext:value-type="float">
            <text:p>S/ 406,014.8</text:p>
          </table:table-cell>
          <table:table-cell table:style-name="ce54" office:value-type="percentage" office:value="0.259546099022746" calcext:value-type="percentage">
            <text:p>25.95 %</text:p>
          </table:table-cell>
          <table:table-cell table:style-name="ce93" table:number-columns-repeated="2"/>
          <table:table-cell/>
          <table:table-cell table:style-name="ce29" table:formula="of:=+[.$T$42]*(1+[.U41])" office:value-type="float" office:value="6.25587815162256" calcext:value-type="float">
            <text:p>6.3</text:p>
          </table:table-cell>
          <table:table-cell table:style-name="ce36" table:formula="of:=+[.U42]-0.04" office:value-type="percentage" office:value="-0.04" calcext:value-type="percentage">
            <text:p>-4.0%</text:p>
          </table:table-cell>
          <table:table-cell table:style-name="ce103" table:formula="of:=MULTIPLE.OPERATIONS([.V$36];[.$F$11];[.$U41])" office:value-type="float" office:value="328455.699336754" calcext:value-type="float">
            <text:p>328,455.7</text:p>
          </table:table-cell>
          <table:table-cell table:style-name="ce54" table:formula="of:=MULTIPLE.OPERATIONS([.W$36];[.$F$11];[.$U41])" office:value-type="percentage" office:value="0.241652247879173" calcext:value-type="percentage">
            <text:p>24.17 %</text:p>
          </table:table-cell>
          <table:table-cell table:style-name="ce107" office:value-type="float" office:value="369041.221091915" calcext:value-type="float">
            <text:p>S/ 369,041.2</text:p>
          </table:table-cell>
          <table:table-cell table:style-name="ce54" office:value-type="percentage" office:value="0.250663877152531" calcext:value-type="percentage">
            <text:p>25.07 %</text:p>
          </table:table-cell>
          <table:table-cell table:number-columns-repeated="16359"/>
        </table:table-row>
        <table:table-row table:style-name="ro1">
          <table:table-cell table:number-columns-repeated="3"/>
          <table:table-cell table:style-name="ce30" table:formula="of:=+[$Resumen.C10]" office:value-type="float" office:value="8.05889830508475" calcext:value-type="float">
            <text:p>8.1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49" table:formula="of:=MULTIPLE.OPERATIONS([.F$36];[.$F$9];[.$E42])" office:value-type="float" office:value="463499.664810987" calcext:value-type="float">
            <text:p>463499.66</text:p>
          </table:table-cell>
          <table:table-cell table:style-name="ce57" table:formula="of:=MULTIPLE.OPERATIONS([.G$36];[.$F$9];[.$E42])" office:value-type="percentage" office:value="0.273634324908836" calcext:value-type="percentage">
            <text:p>27.36 %</text:p>
          </table:table-cell>
          <table:table-cell table:style-name="ce64" office:value-type="float" office:value="357391.084293313" calcext:value-type="float">
            <text:p>357391.1</text:p>
          </table:table-cell>
          <table:table-cell table:style-name="ce57" office:value-type="percentage" office:value="0.247844951675645" calcext:value-type="percentage">
            <text:p>24.78 %</text:p>
          </table:table-cell>
          <table:table-cell/>
          <table:table-cell table:style-name="ce30" table:formula="of:=+[$Resumen.C11]" office:value-type="float" office:value="8.19576271186441" calcext:value-type="float">
            <text:p>8.2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78" table:formula="of:=MULTIPLE.OPERATIONS([.M$36];[.$F$10];[.$L42])" office:value-type="float" office:value="463499.664810987" calcext:value-type="float">
            <text:p>463499.66</text:p>
          </table:table-cell>
          <table:table-cell table:style-name="ce57" table:formula="of:=MULTIPLE.OPERATIONS([.N$36];[.$F$10];[.$L42])" office:value-type="percentage" office:value="0.273634324908836" calcext:value-type="percentage">
            <text:p>27.36 %</text:p>
          </table:table-cell>
          <table:table-cell table:style-name="ce86" office:value-type="float" office:value="357391.084293313" calcext:value-type="float">
            <text:p>S/ 357,391.1</text:p>
          </table:table-cell>
          <table:table-cell table:style-name="ce57" office:value-type="percentage" office:value="0.247844951675645" calcext:value-type="percentage">
            <text:p>24.78 %</text:p>
          </table:table-cell>
          <table:table-cell table:style-name="ce93" table:number-columns-repeated="2"/>
          <table:table-cell/>
          <table:table-cell table:style-name="ce30" table:formula="of:=+[$Resumen.C12]" office:value-type="float" office:value="6.5165397412735" calcext:value-type="float">
            <text:p>6.5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104" table:formula="of:=MULTIPLE.OPERATIONS([.V$36];[.$F$11];[.$U42])" office:value-type="float" office:value="316805.562538153" calcext:value-type="float">
            <text:p>316,805.6</text:p>
          </table:table-cell>
          <table:table-cell table:style-name="ce57" table:formula="of:=MULTIPLE.OPERATIONS([.W$36];[.$F$11];[.$U42])" office:value-type="percentage" office:value="0.238841809921468" calcext:value-type="percentage">
            <text:p>23.88 %</text:p>
          </table:table-cell>
          <table:table-cell table:style-name="ce108" office:value-type="float" office:value="357391.084293313" calcext:value-type="float">
            <text:p>S/ 357,391.1</text:p>
          </table:table-cell>
          <table:table-cell table:style-name="ce57" office:value-type="percentage" office:value="0.247844951675645" calcext:value-type="percentage">
            <text:p>24.78 %</text:p>
          </table:table-cell>
          <table:table-cell table:number-columns-repeated="16359"/>
        </table:table-row>
        <table:table-row table:style-name="ro1">
          <table:table-cell table:number-columns-repeated="3"/>
          <table:table-cell table:style-name="ce29" table:formula="of:=+[.$D$42]*(1+[.E43])" office:value-type="float" office:value="8.38125423728814" calcext:value-type="float">
            <text:p>8.4</text:p>
          </table:table-cell>
          <table:table-cell table:style-name="ce36" table:formula="of:=+[.E42]+0.04" office:value-type="percentage" office:value="0.04" calcext:value-type="percentage">
            <text:p>4.0%</text:p>
          </table:table-cell>
          <table:table-cell table:style-name="ce48" table:formula="of:=MULTIPLE.OPERATIONS([.F$36];[.$F$9];[.$E43])" office:value-type="float" office:value="403290.235098" calcext:value-type="float">
            <text:p>403290.24</text:p>
          </table:table-cell>
          <table:table-cell table:style-name="ce54" table:formula="of:=MULTIPLE.OPERATIONS([.G$36];[.$F$9];[.$E43])" office:value-type="percentage" office:value="0.259341683340831" calcext:value-type="percentage">
            <text:p>25.93 %</text:p>
          </table:table-cell>
          <table:table-cell table:style-name="ce63" office:value-type="float" office:value="297181.654580326" calcext:value-type="float">
            <text:p>297181.7</text:p>
          </table:table-cell>
          <table:table-cell table:style-name="ce54" office:value-type="percentage" office:value="0.233195174667564" calcext:value-type="percentage">
            <text:p>23.32 %</text:p>
          </table:table-cell>
          <table:table-cell/>
          <table:table-cell table:style-name="ce29" table:formula="of:=+[.$K$42]*(1+[.L43])" office:value-type="float" office:value="8.52359322033898" calcext:value-type="float">
            <text:p>8.5</text:p>
          </table:table-cell>
          <table:table-cell table:style-name="ce36" table:formula="of:=+[.L42]+0.04" office:value-type="percentage" office:value="0.04" calcext:value-type="percentage">
            <text:p>4.0%</text:p>
          </table:table-cell>
          <table:table-cell table:style-name="ce77" table:formula="of:=MULTIPLE.OPERATIONS([.M$36];[.$F$10];[.$L43])" office:value-type="float" office:value="414875.941277477" calcext:value-type="float">
            <text:p>414875.94</text:p>
          </table:table-cell>
          <table:table-cell table:style-name="ce54" table:formula="of:=MULTIPLE.OPERATIONS([.N$36];[.$F$10];[.$L43])" office:value-type="percentage" office:value="0.262138756719453" calcext:value-type="percentage">
            <text:p>26.21 %</text:p>
          </table:table-cell>
          <table:table-cell table:style-name="ce85" office:value-type="float" office:value="308767.360759803" calcext:value-type="float">
            <text:p>S/ 308,767.4</text:p>
          </table:table-cell>
          <table:table-cell table:style-name="ce54" office:value-type="percentage" office:value="0.236054260666825" calcext:value-type="percentage">
            <text:p>23.61 %</text:p>
          </table:table-cell>
          <table:table-cell table:style-name="ce93" table:number-columns-repeated="2"/>
          <table:table-cell/>
          <table:table-cell table:style-name="ce29" table:formula="of:=+[.$T$42]*(1+[.U43])" office:value-type="float" office:value="6.77720133092444" calcext:value-type="float">
            <text:p>6.8</text:p>
          </table:table-cell>
          <table:table-cell table:style-name="ce36" table:formula="of:=+[.U42]+0.04" office:value-type="percentage" office:value="0.04" calcext:value-type="percentage">
            <text:p>4.0%</text:p>
          </table:table-cell>
          <table:table-cell table:style-name="ce103" table:formula="of:=MULTIPLE.OPERATIONS([.V$36];[.$F$11];[.$U43])" office:value-type="float" office:value="305155.425739552" calcext:value-type="float">
            <text:p>305,155.4</text:p>
          </table:table-cell>
          <table:table-cell table:style-name="ce54" table:formula="of:=MULTIPLE.OPERATIONS([.W$36];[.$F$11];[.$U43])" office:value-type="percentage" office:value="0.236026612793479" calcext:value-type="percentage">
            <text:p>23.60 %</text:p>
          </table:table-cell>
          <table:table-cell table:style-name="ce107" office:value-type="float" office:value="345740.947494712" calcext:value-type="float">
            <text:p>S/ 345,740.9</text:p>
          </table:table-cell>
          <table:table-cell table:style-name="ce54" office:value-type="percentage" office:value="0.24502134905811" calcext:value-type="percentage">
            <text:p>24.50 %</text:p>
          </table:table-cell>
          <table:table-cell table:number-columns-repeated="16359"/>
        </table:table-row>
        <table:table-row table:style-name="ro1">
          <table:table-cell table:number-columns-repeated="3"/>
          <table:table-cell table:style-name="ce29" table:formula="of:=+[.$D$42]*(1+[.E44])" office:value-type="float" office:value="8.70361016949153" calcext:value-type="float">
            <text:p>8.7</text:p>
          </table:table-cell>
          <table:table-cell table:style-name="ce36" table:formula="of:=+[.E43]+0.04" office:value-type="percentage" office:value="0.08" calcext:value-type="percentage">
            <text:p>8.0%</text:p>
          </table:table-cell>
          <table:table-cell table:style-name="ce48" table:formula="of:=MULTIPLE.OPERATIONS([.F$36];[.$F$9];[.$E44])" office:value-type="float" office:value="343080.805385013" calcext:value-type="float">
            <text:p>343080.81</text:p>
          </table:table-cell>
          <table:table-cell table:style-name="ce54" table:formula="of:=MULTIPLE.OPERATIONS([.G$36];[.$F$9];[.$E44])" office:value-type="percentage" office:value="0.244946697467426" calcext:value-type="percentage">
            <text:p>24.49 %</text:p>
          </table:table-cell>
          <table:table-cell table:style-name="ce63" office:value-type="float" office:value="236972.224867339" calcext:value-type="float">
            <text:p>236972.2</text:p>
          </table:table-cell>
          <table:table-cell table:style-name="ce54" office:value-type="percentage" office:value="0.218404422264943" calcext:value-type="percentage">
            <text:p>21.84 %</text:p>
          </table:table-cell>
          <table:table-cell/>
          <table:table-cell table:style-name="ce29" table:formula="of:=+[.$K$42]*(1+[.L44])" office:value-type="float" office:value="8.85142372881356" calcext:value-type="float">
            <text:p>8.9</text:p>
          </table:table-cell>
          <table:table-cell table:style-name="ce36" table:formula="of:=+[.L43]+0.04" office:value-type="percentage" office:value="0.08" calcext:value-type="percentage">
            <text:p>8.0%</text:p>
          </table:table-cell>
          <table:table-cell table:style-name="ce77" table:formula="of:=MULTIPLE.OPERATIONS([.M$36];[.$F$10];[.$L44])" office:value-type="float" office:value="366252.217743967" calcext:value-type="float">
            <text:p>366252.22</text:p>
          </table:table-cell>
          <table:table-cell table:style-name="ce54" table:formula="of:=MULTIPLE.OPERATIONS([.N$36];[.$F$10];[.$L44])" office:value-type="percentage" office:value="0.250569493530563" calcext:value-type="percentage">
            <text:p>25.06 %</text:p>
          </table:table-cell>
          <table:table-cell table:style-name="ce85" office:value-type="float" office:value="260143.637226293" calcext:value-type="float">
            <text:p>S/ 260,143.6</text:p>
          </table:table-cell>
          <table:table-cell table:style-name="ce54" office:value-type="percentage" office:value="0.224164756383577" calcext:value-type="percentage">
            <text:p>22.42 %</text:p>
          </table:table-cell>
          <table:table-cell table:style-name="ce93" table:number-columns-repeated="2"/>
          <table:table-cell/>
          <table:table-cell table:style-name="ce29" table:formula="of:=+[.$T$42]*(1+[.U44])" office:value-type="float" office:value="7.03786292057538" calcext:value-type="float">
            <text:p>7.0</text:p>
          </table:table-cell>
          <table:table-cell table:style-name="ce36" table:formula="of:=+[.U43]+0.04" office:value-type="percentage" office:value="0.08" calcext:value-type="percentage">
            <text:p>8.0%</text:p>
          </table:table-cell>
          <table:table-cell table:style-name="ce103" table:formula="of:=MULTIPLE.OPERATIONS([.V$36];[.$F$11];[.$U44])" office:value-type="float" office:value="293505.28894095" calcext:value-type="float">
            <text:p>293,505.3</text:p>
          </table:table-cell>
          <table:table-cell table:style-name="ce54" table:formula="of:=MULTIPLE.OPERATIONS([.W$36];[.$F$11];[.$U44])" office:value-type="percentage" office:value="0.233206533778206" calcext:value-type="percentage">
            <text:p>23.32 %</text:p>
          </table:table-cell>
          <table:table-cell table:style-name="ce107" office:value-type="float" office:value="334090.81069611" calcext:value-type="float">
            <text:p>S/ 334,090.8</text:p>
          </table:table-cell>
          <table:table-cell table:style-name="ce54" office:value-type="percentage" office:value="0.242192947308191" calcext:value-type="percentage">
            <text:p>24.22 %</text:p>
          </table:table-cell>
          <table:table-cell table:number-columns-repeated="16359"/>
        </table:table-row>
        <table:table-row table:style-name="ro1">
          <table:table-cell table:number-columns-repeated="3"/>
          <table:table-cell table:style-name="ce29" table:formula="of:=+[.$D$42]*(1+[.E45])" office:value-type="float" office:value="9.02596610169492" calcext:value-type="float">
            <text:p>9.0</text:p>
          </table:table-cell>
          <table:table-cell table:style-name="ce36" table:formula="of:=+[.E44]+0.04" office:value-type="percentage" office:value="0.12" calcext:value-type="percentage">
            <text:p>12.0%</text:p>
          </table:table-cell>
          <table:table-cell table:style-name="ce48" table:formula="of:=MULTIPLE.OPERATIONS([.F$36];[.$F$9];[.$E45])" office:value-type="float" office:value="282871.375672026" calcext:value-type="float">
            <text:p>282871.38</text:p>
          </table:table-cell>
          <table:table-cell table:style-name="ce54" table:formula="of:=MULTIPLE.OPERATIONS([.G$36];[.$F$9];[.$E45])" office:value-type="percentage" office:value="0.230434054672784" calcext:value-type="percentage">
            <text:p>23.04 %</text:p>
          </table:table-cell>
          <table:table-cell table:style-name="ce63" office:value-type="float" office:value="176762.795154352" calcext:value-type="float">
            <text:p>176762.8</text:p>
          </table:table-cell>
          <table:table-cell table:style-name="ce54" office:value-type="percentage" office:value="0.203453538551467" calcext:value-type="percentage">
            <text:p>20.35 %</text:p>
          </table:table-cell>
          <table:table-cell/>
          <table:table-cell table:style-name="ce29" table:formula="of:=+[.$K$42]*(1+[.L45])" office:value-type="float" office:value="9.17925423728814" calcext:value-type="float">
            <text:p>9.2</text:p>
          </table:table-cell>
          <table:table-cell table:style-name="ce36" table:formula="of:=+[.L44]+0.04" office:value-type="percentage" office:value="0.12" calcext:value-type="percentage">
            <text:p>12.0%</text:p>
          </table:table-cell>
          <table:table-cell table:style-name="ce77" table:formula="of:=MULTIPLE.OPERATIONS([.M$36];[.$F$10];[.$L45])" office:value-type="float" office:value="317628.494210458" calcext:value-type="float">
            <text:p>317628.49</text:p>
          </table:table-cell>
          <table:table-cell table:style-name="ce54" table:formula="of:=MULTIPLE.OPERATIONS([.N$36];[.$F$10];[.$L45])" office:value-type="percentage" office:value="0.238918549250579" calcext:value-type="percentage">
            <text:p>23.89 %</text:p>
          </table:table-cell>
          <table:table-cell table:style-name="ce85" office:value-type="float" office:value="211519.913692784" calcext:value-type="float">
            <text:p>S/ 211,519.9</text:p>
          </table:table-cell>
          <table:table-cell table:style-name="ce54" office:value-type="percentage" office:value="0.212166435830533" calcext:value-type="percentage">
            <text:p>21.22 %</text:p>
          </table:table-cell>
          <table:table-cell table:style-name="ce93" table:number-columns-repeated="2"/>
          <table:table-cell/>
          <table:table-cell table:style-name="ce29" table:formula="of:=+[.$T$42]*(1+[.U45])" office:value-type="float" office:value="7.29852451022632" calcext:value-type="float">
            <text:p>7.3</text:p>
          </table:table-cell>
          <table:table-cell table:style-name="ce36" table:formula="of:=+[.U44]+0.04" office:value-type="percentage" office:value="0.12" calcext:value-type="percentage">
            <text:p>12.0%</text:p>
          </table:table-cell>
          <table:table-cell table:style-name="ce103" table:formula="of:=MULTIPLE.OPERATIONS([.V$36];[.$F$11];[.$U45])" office:value-type="float" office:value="281855.152142349" calcext:value-type="float">
            <text:p>281,855.2</text:p>
          </table:table-cell>
          <table:table-cell table:style-name="ce54" table:formula="of:=MULTIPLE.OPERATIONS([.W$36];[.$F$11];[.$U45])" office:value-type="percentage" office:value="0.230381448002526" calcext:value-type="percentage">
            <text:p>23.04 %</text:p>
          </table:table-cell>
          <table:table-cell table:style-name="ce107" office:value-type="float" office:value="322440.673897509" calcext:value-type="float">
            <text:p>S/ 322,440.7</text:p>
          </table:table-cell>
          <table:table-cell table:style-name="ce54" office:value-type="percentage" office:value="0.23935962227199" calcext:value-type="percentage">
            <text:p>23.94 %</text:p>
          </table:table-cell>
          <table:table-cell table:number-columns-repeated="16359"/>
        </table:table-row>
        <table:table-row table:style-name="ro1">
          <table:table-cell table:number-columns-repeated="3"/>
          <table:table-cell table:style-name="ce29" table:formula="of:=+[.$D$42]*(1+[.E46])" office:value-type="float" office:value="9.3082276465488" calcext:value-type="float">
            <text:p>9.3</text:p>
          </table:table-cell>
          <table:table-cell table:style-name="ce36" table:formula="of:=+[.G9]" office:value-type="percentage" office:value="0.155024830214794" calcext:value-type="percentage">
            <text:p>15.5%</text:p>
          </table:table-cell>
          <table:table-cell table:style-name="ce48" table:formula="of:=MULTIPLE.OPERATIONS([.F$36];[.$F$9];[.$E46])" office:value-type="float" office:value="230150.749346353" calcext:value-type="float">
            <text:p>230150.75</text:p>
          </table:table-cell>
          <table:table-cell table:style-name="ce54" table:formula="of:=MULTIPLE.OPERATIONS([.G$36];[.$F$9];[.$E46])" office:value-type="percentage" office:value="0.217616745238991" calcext:value-type="percentage">
            <text:p>21.76 %</text:p>
          </table:table-cell>
          <table:table-cell table:style-name="ce63" office:value-type="float" office:value="124042.168828679" calcext:value-type="float">
            <text:p>124042.2</text:p>
          </table:table-cell>
          <table:table-cell table:style-name="ce54" office:value-type="percentage" office:value="0.190214206925099" calcext:value-type="percentage">
            <text:p>19.02 %</text:p>
          </table:table-cell>
          <table:table-cell/>
          <table:table-cell table:style-name="ce29" table:formula="of:=+[.$K$42]*(1+[.L46])" office:value-type="float" office:value="9.50708474576271" calcext:value-type="float">
            <text:p>9.5</text:p>
          </table:table-cell>
          <table:table-cell table:style-name="ce36" table:formula="of:=+[.L45]+0.04" office:value-type="percentage" office:value="0.16" calcext:value-type="percentage">
            <text:p>16.0%</text:p>
          </table:table-cell>
          <table:table-cell table:style-name="ce77" table:formula="of:=MULTIPLE.OPERATIONS([.M$36];[.$F$10];[.$L46])" office:value-type="float" office:value="269004.770676948" calcext:value-type="float">
            <text:p>269004.77</text:p>
          </table:table-cell>
          <table:table-cell table:style-name="ce54" table:formula="of:=MULTIPLE.OPERATIONS([.N$36];[.$F$10];[.$L46])" office:value-type="percentage" office:value="0.227177341465852" calcext:value-type="percentage">
            <text:p>22.72 %</text:p>
          </table:table-cell>
          <table:table-cell table:style-name="ce85" office:value-type="float" office:value="162896.190159274" calcext:value-type="float">
            <text:p>S/ 162,896.2</text:p>
          </table:table-cell>
          <table:table-cell table:style-name="ce54" office:value-type="percentage" office:value="0.200048486890507" calcext:value-type="percentage">
            <text:p>20.00 %</text:p>
          </table:table-cell>
          <table:table-cell table:style-name="ce93" table:number-columns-repeated="2"/>
          <table:table-cell/>
          <table:table-cell table:style-name="ce29" table:formula="of:=+[.$T$42]*(1+[.U46])" office:value-type="float" office:value="7.55918609987725" calcext:value-type="float">
            <text:p>7.6</text:p>
          </table:table-cell>
          <table:table-cell table:style-name="ce36" table:formula="of:=+[.U45]+0.04" office:value-type="percentage" office:value="0.16" calcext:value-type="percentage">
            <text:p>16.0%</text:p>
          </table:table-cell>
          <table:table-cell table:style-name="ce103" table:formula="of:=MULTIPLE.OPERATIONS([.V$36];[.$F$11];[.$U46])" office:value-type="float" office:value="270205.015343748" calcext:value-type="float">
            <text:p>270,205.0</text:p>
          </table:table-cell>
          <table:table-cell table:style-name="ce54" table:formula="of:=MULTIPLE.OPERATIONS([.W$36];[.$F$11];[.$U46])" office:value-type="percentage" office:value="0.227551228387809" calcext:value-type="percentage">
            <text:p>22.76 %</text:p>
          </table:table-cell>
          <table:table-cell table:style-name="ce107" office:value-type="float" office:value="310790.537098908" calcext:value-type="float">
            <text:p>S/ 310,790.5</text:p>
          </table:table-cell>
          <table:table-cell table:style-name="ce54" office:value-type="percentage" office:value="0.236521247583124" calcext:value-type="percentage">
            <text:p>23.65 %</text:p>
          </table:table-cell>
          <table:table-cell table:number-columns-repeated="16359"/>
        </table:table-row>
        <table:table-row table:style-name="ro1">
          <table:table-cell table:number-columns-repeated="3"/>
          <table:table-cell table:style-name="ce29" table:formula="of:=+[.$D$42]*(1+[.E47])" office:value-type="float" office:value="9.63058357875219" calcext:value-type="float">
            <text:p>9.6</text:p>
          </table:table-cell>
          <table:table-cell table:style-name="ce36" table:formula="of:=+[.E46]+0.04" office:value-type="percentage" office:value="0.195024830214794" calcext:value-type="percentage">
            <text:p>19.5%</text:p>
          </table:table-cell>
          <table:table-cell table:style-name="ce48" table:formula="of:=MULTIPLE.OPERATIONS([.F$36];[.$F$9];[.$E47])" office:value-type="float" office:value="169941.319633366" calcext:value-type="float">
            <text:p>169941.32</text:p>
          </table:table-cell>
          <table:table-cell table:style-name="ce54" table:formula="of:=MULTIPLE.OPERATIONS([.G$36];[.$F$9];[.$E47])" office:value-type="percentage" office:value="0.202837096203088" calcext:value-type="percentage">
            <text:p>20.28 %</text:p>
          </table:table-cell>
          <table:table-cell table:style-name="ce63" office:value-type="float" office:value="63832.7391156922" calcext:value-type="float">
            <text:p>63832.7</text:p>
          </table:table-cell>
          <table:table-cell table:style-name="ce54" office:value-type="percentage" office:value="0.174904459499472" calcext:value-type="percentage">
            <text:p>17.49 %</text:p>
          </table:table-cell>
          <table:table-cell/>
          <table:table-cell table:style-name="ce29" table:formula="of:=+[.$K$42]*(1+[.L47])" office:value-type="float" office:value="9.77198998626843" calcext:value-type="float">
            <text:p>9.8</text:p>
          </table:table-cell>
          <table:table-cell table:style-name="ce36" table:formula="of:=+[.G10]" office:value-type="percentage" office:value="0.192322219397864" calcext:value-type="percentage">
            <text:p>19.2%</text:p>
          </table:table-cell>
          <table:table-cell table:style-name="ce77" table:formula="of:=MULTIPLE.OPERATIONS([.M$36];[.$F$10];[.$L47])" office:value-type="float" office:value="229714.104177168" calcext:value-type="float">
            <text:p>229714.10</text:p>
          </table:table-cell>
          <table:table-cell table:style-name="ce54" table:formula="of:=MULTIPLE.OPERATIONS([.N$36];[.$F$10];[.$L47])" office:value-type="percentage" office:value="0.217617563090239" calcext:value-type="percentage">
            <text:p>21.76 %</text:p>
          </table:table-cell>
          <table:table-cell table:style-name="ce85" office:value-type="float" office:value="123605.523659495" calcext:value-type="float">
            <text:p>S/ 123,605.5</text:p>
          </table:table-cell>
          <table:table-cell table:style-name="ce54" office:value-type="percentage" office:value="0.190161150277362" calcext:value-type="percentage">
            <text:p>19.02 %</text:p>
          </table:table-cell>
          <table:table-cell table:style-name="ce93" table:number-columns-repeated="2"/>
          <table:table-cell/>
          <table:table-cell table:style-name="ce29" table:formula="of:=+[.$T$42]*(1+[.U47])" office:value-type="float" office:value="7.8198476895282" calcext:value-type="float">
            <text:p>7.8</text:p>
          </table:table-cell>
          <table:table-cell table:style-name="ce36" table:formula="of:=+[.U46]+0.04" office:value-type="percentage" office:value="0.2" calcext:value-type="percentage">
            <text:p>20.0%</text:p>
          </table:table-cell>
          <table:table-cell table:style-name="ce103" table:formula="of:=MULTIPLE.OPERATIONS([.V$36];[.$F$11];[.$U47])" office:value-type="float" office:value="258554.878545146" calcext:value-type="float">
            <text:p>258,554.9</text:p>
          </table:table-cell>
          <table:table-cell table:style-name="ce54" table:formula="of:=MULTIPLE.OPERATIONS([.W$36];[.$F$11];[.$U47])" office:value-type="percentage" office:value="0.22471574559906" calcext:value-type="percentage">
            <text:p>22.47 %</text:p>
          </table:table-cell>
          <table:table-cell table:style-name="ce107" office:value-type="float" office:value="299140.400300306" calcext:value-type="float">
            <text:p>S/ 299,140.4</text:p>
          </table:table-cell>
          <table:table-cell table:style-name="ce54" office:value-type="percentage" office:value="0.233677694611051" calcext:value-type="percentage">
            <text:p>23.37 %</text:p>
          </table:table-cell>
          <table:table-cell table:number-columns-repeated="1635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table:style-name="ce25" office:value-type="string" calcext:value-type="string">
            <text:p>V. Venta</text:p>
          </table:table-cell>
          <table:table-cell table:style-name="ce25" office:value-type="string" calcext:value-type="string">
            <text:p>Var. porc.</text:p>
          </table:table-cell>
          <table:table-cell table:style-name="ce25" office:value-type="string" calcext:value-type="string">
            <text:p>VANE </text:p>
          </table:table-cell>
          <table:table-cell table:style-name="ce25" office:value-type="string" calcext:value-type="string">
            <text:p>TIRE</text:p>
          </table:table-cell>
          <table:table-cell table:style-name="ce25" office:value-type="string" calcext:value-type="string">
            <text:p>VANF</text:p>
          </table:table-cell>
          <table:table-cell table:style-name="ce25" office:value-type="string" calcext:value-type="string">
            <text:p>TIRF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6"/>
          <table:table-cell table:style-name="ce35"/>
          <table:table-cell table:style-name="ce45" table:formula="of:=+[$Rentabilidad.C11]" office:value-type="float" office:value="463499.664810987" calcext:value-type="float">
            <text:p>463499.66</text:p>
          </table:table-cell>
          <table:table-cell table:style-name="ce56" table:formula="of:=+[$Rentabilidad.C13]" office:value-type="percentage" office:value="0.273634324908836" calcext:value-type="percentage">
            <text:p>27.36 %</text:p>
          </table:table-cell>
          <table:table-cell table:style-name="ce60" table:formula="of:=+[$Rentabilidad.C23]" office:value-type="float" office:value="504085.186566147" calcext:value-type="float">
            <text:p>504085.2</text:p>
          </table:table-cell>
          <table:table-cell table:style-name="ce56" table:formula="of:=+[$Rentabilidad.C25]" office:value-type="percentage" office:value="0.282726593166351" calcext:value-type="percentage">
            <text:p>28.27 %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9" table:formula="of:=+[.$D$57]*(1+[.E52])" office:value-type="float" office:value="562668.801755448" calcext:value-type="float">
            <text:p>562668.8</text:p>
          </table:table-cell>
          <table:table-cell table:style-name="ce36" table:formula="of:=+[.E53]-0.05" office:value-type="percentage" office:value="-0.25" calcext:value-type="percentage">
            <text:p>-25.0%</text:p>
          </table:table-cell>
          <table:table-cell table:style-name="ce50" table:formula="of:=MULTIPLE.OPERATIONS([.F$51];[.$F$12];[.$E52])" office:value-type="float" office:value="651055.932062803" calcext:value-type="float">
            <text:p>651055.93</text:p>
          </table:table-cell>
          <table:table-cell table:style-name="ce54" table:formula="of:=MULTIPLE.OPERATIONS([.G$51];[.$F$12];[.$E52])" office:value-type="percentage" office:value="0.356905904368631" calcext:value-type="percentage">
            <text:p>35.69 %</text:p>
          </table:table-cell>
          <table:table-cell table:style-name="ce65" office:value-type="float" office:value="544947.351545129" calcext:value-type="float">
            <text:p>544947.4</text:p>
          </table:table-cell>
          <table:table-cell table:style-name="ce54" office:value-type="percentage" office:value="0.326003490462446" calcext:value-type="percentage">
            <text:p>32.60 %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9" table:formula="of:=+[.$D$57]*(1+[.E53])" office:value-type="float" office:value="600180.055205811" calcext:value-type="float">
            <text:p>600180.1</text:p>
          </table:table-cell>
          <table:table-cell table:style-name="ce36" table:formula="of:=+[.E54]-0.05" office:value-type="percentage" office:value="-0.2" calcext:value-type="percentage">
            <text:p>-20.0%</text:p>
          </table:table-cell>
          <table:table-cell table:style-name="ce50" table:formula="of:=MULTIPLE.OPERATIONS([.F$51];[.$F$12];[.$E53])" office:value-type="float" office:value="613544.67861244" calcext:value-type="float">
            <text:p>613544.68</text:p>
          </table:table-cell>
          <table:table-cell table:style-name="ce54" table:formula="of:=MULTIPLE.OPERATIONS([.G$51];[.$F$12];[.$E53])" office:value-type="percentage" office:value="0.337015510567204" calcext:value-type="percentage">
            <text:p>33.70 %</text:p>
          </table:table-cell>
          <table:table-cell table:style-name="ce65" office:value-type="float" office:value="507436.098094766" calcext:value-type="float">
            <text:p>507436.1</text:p>
          </table:table-cell>
          <table:table-cell table:style-name="ce54" office:value-type="percentage" office:value="0.307389710425889" calcext:value-type="percentage">
            <text:p>30.74 %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9" table:formula="of:=+[.$D$57]*(1+[.E54])" office:value-type="float" office:value="637691.308656174" calcext:value-type="float">
            <text:p>637691.3</text:p>
          </table:table-cell>
          <table:table-cell table:style-name="ce36" table:formula="of:=+[.E55]-0.05" office:value-type="percentage" office:value="-0.15" calcext:value-type="percentage">
            <text:p>-15.0%</text:p>
          </table:table-cell>
          <table:table-cell table:style-name="ce50" table:formula="of:=MULTIPLE.OPERATIONS([.F$51];[.$F$12];[.$E54])" office:value-type="float" office:value="576033.425162077" calcext:value-type="float">
            <text:p>576033.43</text:p>
          </table:table-cell>
          <table:table-cell table:style-name="ce54" table:formula="of:=MULTIPLE.OPERATIONS([.G$51];[.$F$12];[.$E54])" office:value-type="percentage" office:value="0.318996195570911" calcext:value-type="percentage">
            <text:p>31.90 %</text:p>
          </table:table-cell>
          <table:table-cell table:style-name="ce65" office:value-type="float" office:value="469924.844644403" calcext:value-type="float">
            <text:p>469924.8</text:p>
          </table:table-cell>
          <table:table-cell table:style-name="ce54" office:value-type="percentage" office:value="0.290497389243085" calcext:value-type="percentage">
            <text:p>29.05 %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9" table:formula="of:=+[.$D$57]*(1+[.E55])" office:value-type="float" office:value="675202.562106538" calcext:value-type="float">
            <text:p>675202.6</text:p>
          </table:table-cell>
          <table:table-cell table:style-name="ce36" table:formula="of:=+[.E56]-0.05" office:value-type="percentage" office:value="-0.1" calcext:value-type="percentage">
            <text:p>-10.0%</text:p>
          </table:table-cell>
          <table:table-cell table:style-name="ce50" table:formula="of:=MULTIPLE.OPERATIONS([.F$51];[.$F$12];[.$E55])" office:value-type="float" office:value="538522.171711713" calcext:value-type="float">
            <text:p>538522.17</text:p>
          </table:table-cell>
          <table:table-cell table:style-name="ce54" table:formula="of:=MULTIPLE.OPERATIONS([.G$51];[.$F$12];[.$E55])" office:value-type="percentage" office:value="0.302569086779209" calcext:value-type="percentage">
            <text:p>30.26 %</text:p>
          </table:table-cell>
          <table:table-cell table:style-name="ce65" office:value-type="float" office:value="432413.591194039" calcext:value-type="float">
            <text:p>432413.6</text:p>
          </table:table-cell>
          <table:table-cell table:style-name="ce54" office:value-type="percentage" office:value="0.275072777378012" calcext:value-type="percentage">
            <text:p>27.51 %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9" table:formula="of:=+[.$D$57]*(1+[.E56])" office:value-type="float" office:value="712713.815556901" calcext:value-type="float">
            <text:p>712713.8</text:p>
          </table:table-cell>
          <table:table-cell table:style-name="ce36" table:formula="of:=+[.E57]-0.05" office:value-type="percentage" office:value="-0.05" calcext:value-type="percentage">
            <text:p>-5.0%</text:p>
          </table:table-cell>
          <table:table-cell table:style-name="ce50" table:formula="of:=MULTIPLE.OPERATIONS([.F$51];[.$F$12];[.$E56])" office:value-type="float" office:value="501010.91826135" calcext:value-type="float">
            <text:p>501010.92</text:p>
          </table:table-cell>
          <table:table-cell table:style-name="ce54" table:formula="of:=MULTIPLE.OPERATIONS([.G$51];[.$F$12];[.$E56])" office:value-type="percentage" office:value="0.287509505179934" calcext:value-type="percentage">
            <text:p>28.75 %</text:p>
          </table:table-cell>
          <table:table-cell table:style-name="ce65" office:value-type="float" office:value="394902.337743676" calcext:value-type="float">
            <text:p>394902.3</text:p>
          </table:table-cell>
          <table:table-cell table:style-name="ce54" office:value-type="percentage" office:value="0.260911047741969" calcext:value-type="percentage">
            <text:p>26.09 %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30" table:formula="of:=+[$'Inversión inicial'.F8]" office:value-type="float" office:value="750225.069007264" calcext:value-type="float">
            <text:p>750225.1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51" table:formula="of:=MULTIPLE.OPERATIONS([.F$51];[.$F$12];[.$E57])" office:value-type="float" office:value="463499.664810987" calcext:value-type="float">
            <text:p>463499.66</text:p>
          </table:table-cell>
          <table:table-cell table:style-name="ce57" table:formula="of:=MULTIPLE.OPERATIONS([.G$51];[.$F$12];[.$E57])" office:value-type="percentage" office:value="0.273634324908836" calcext:value-type="percentage">
            <text:p>27.36 %</text:p>
          </table:table-cell>
          <table:table-cell table:style-name="ce66" office:value-type="float" office:value="357391.084293313" calcext:value-type="float">
            <text:p>357391.1</text:p>
          </table:table-cell>
          <table:table-cell table:style-name="ce57" office:value-type="percentage" office:value="0.247844951675645" calcext:value-type="percentage">
            <text:p>24.78 %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9" table:formula="of:=+[.$D$57]*(1+[.E58])" office:value-type="float" office:value="787736.322457627" calcext:value-type="float">
            <text:p>787736.3</text:p>
          </table:table-cell>
          <table:table-cell table:style-name="ce36" table:formula="of:=+[.E57]+0.05" office:value-type="percentage" office:value="0.05" calcext:value-type="percentage">
            <text:p>5.0%</text:p>
          </table:table-cell>
          <table:table-cell table:style-name="ce50" table:formula="of:=MULTIPLE.OPERATIONS([.F$51];[.$F$12];[.$E58])" office:value-type="float" office:value="425988.411360624" calcext:value-type="float">
            <text:p>425988.41</text:p>
          </table:table-cell>
          <table:table-cell table:style-name="ce54" table:formula="of:=MULTIPLE.OPERATIONS([.G$51];[.$F$12];[.$E58])" office:value-type="percentage" office:value="0.260792713312963" calcext:value-type="percentage">
            <text:p>26.08 %</text:p>
          </table:table-cell>
          <table:table-cell table:style-name="ce65" office:value-type="float" office:value="319879.83084295" calcext:value-type="float">
            <text:p>319879.8</text:p>
          </table:table-cell>
          <table:table-cell table:style-name="ce54" office:value-type="percentage" office:value="0.235736495270938" calcext:value-type="percentage">
            <text:p>23.57 %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9" table:formula="of:=+[.$D$57]*(1+[.E59])" office:value-type="float" office:value="825247.575907991" calcext:value-type="float">
            <text:p>825247.6</text:p>
          </table:table-cell>
          <table:table-cell table:style-name="ce36" table:formula="of:=+[.E58]+0.05" office:value-type="percentage" office:value="0.1" calcext:value-type="percentage">
            <text:p>10.0%</text:p>
          </table:table-cell>
          <table:table-cell table:style-name="ce50" table:formula="of:=MULTIPLE.OPERATIONS([.F$51];[.$F$12];[.$E59])" office:value-type="float" office:value="388477.157910261" calcext:value-type="float">
            <text:p>388477.16</text:p>
          </table:table-cell>
          <table:table-cell table:style-name="ce54" table:formula="of:=MULTIPLE.OPERATIONS([.G$51];[.$F$12];[.$E59])" office:value-type="percentage" office:value="0.248859244398176" calcext:value-type="percentage">
            <text:p>24.89 %</text:p>
          </table:table-cell>
          <table:table-cell table:style-name="ce65" office:value-type="float" office:value="282368.577392587" calcext:value-type="float">
            <text:p>282368.6</text:p>
          </table:table-cell>
          <table:table-cell table:style-name="ce54" office:value-type="percentage" office:value="0.224470739246454" calcext:value-type="percentage">
            <text:p>22.45 %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9" table:formula="of:=+[.$D$57]*(1+[.E60])" office:value-type="float" office:value="862758.829358354" calcext:value-type="float">
            <text:p>862758.8</text:p>
          </table:table-cell>
          <table:table-cell table:style-name="ce36" table:formula="of:=+[.E59]+0.05" office:value-type="percentage" office:value="0.15" calcext:value-type="percentage">
            <text:p>15.0%</text:p>
          </table:table-cell>
          <table:table-cell table:style-name="ce50" table:formula="of:=MULTIPLE.OPERATIONS([.F$51];[.$F$12];[.$E60])" office:value-type="float" office:value="350965.904459898" calcext:value-type="float">
            <text:p>350965.90</text:p>
          </table:table-cell>
          <table:table-cell table:style-name="ce54" table:formula="of:=MULTIPLE.OPERATIONS([.G$51];[.$F$12];[.$E60])" office:value-type="percentage" office:value="0.237728706260397" calcext:value-type="percentage">
            <text:p>23.77 %</text:p>
          </table:table-cell>
          <table:table-cell table:style-name="ce65" office:value-type="float" office:value="244857.323942224" calcext:value-type="float">
            <text:p>244857.3</text:p>
          </table:table-cell>
          <table:table-cell table:style-name="ce54" office:value-type="percentage" office:value="0.213951116659384" calcext:value-type="percentage">
            <text:p>21.40 %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9" table:formula="of:=+[.$D$57]*(1+[.E61])" office:value-type="float" office:value="900270.082808717" calcext:value-type="float">
            <text:p>900270.1</text:p>
          </table:table-cell>
          <table:table-cell table:style-name="ce36" table:formula="of:=+[.E60]+0.05" office:value-type="percentage" office:value="0.2" calcext:value-type="percentage">
            <text:p>20.0%</text:p>
          </table:table-cell>
          <table:table-cell table:style-name="ce50" table:formula="of:=MULTIPLE.OPERATIONS([.F$51];[.$F$12];[.$E61])" office:value-type="float" office:value="313454.651009534" calcext:value-type="float">
            <text:p>313454.65</text:p>
          </table:table-cell>
          <table:table-cell table:style-name="ce54" table:formula="of:=MULTIPLE.OPERATIONS([.G$51];[.$F$12];[.$E61])" office:value-type="percentage" office:value="0.227312135987056" calcext:value-type="percentage">
            <text:p>22.73 %</text:p>
          </table:table-cell>
          <table:table-cell table:style-name="ce65" office:value-type="float" office:value="207346.07049186" calcext:value-type="float">
            <text:p>207346.1</text:p>
          </table:table-cell>
          <table:table-cell table:style-name="ce54" office:value-type="percentage" office:value="0.204095852012925" calcext:value-type="percentage">
            <text:p>20.41 %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9" table:formula="of:=+[.$D$57]*(1+[.E62])" office:value-type="float" office:value="937781.33625908" calcext:value-type="float">
            <text:p>937781.3</text:p>
          </table:table-cell>
          <table:table-cell table:style-name="ce36" table:formula="of:=+[.E61]+0.05" office:value-type="percentage" office:value="0.25" calcext:value-type="percentage">
            <text:p>25.0%</text:p>
          </table:table-cell>
          <table:table-cell table:style-name="ce50" table:formula="of:=MULTIPLE.OPERATIONS([.F$51];[.$F$12];[.$E62])" office:value-type="float" office:value="275943.397559171" calcext:value-type="float">
            <text:p>275943.40</text:p>
          </table:table-cell>
          <table:table-cell table:style-name="ce54" table:formula="of:=MULTIPLE.OPERATIONS([.G$51];[.$F$12];[.$E62])" office:value-type="percentage" office:value="0.217533756436191" calcext:value-type="percentage">
            <text:p>21.75 %</text:p>
          </table:table-cell>
          <table:table-cell table:style-name="ce65" office:value-type="float" office:value="169834.817041497" calcext:value-type="float">
            <text:p>169834.8</text:p>
          </table:table-cell>
          <table:table-cell table:style-name="ce54" office:value-type="percentage" office:value="0.194835190746402" calcext:value-type="percentage">
            <text:p>19.48 %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table:style-name="ce21" office:value-type="string" calcext:value-type="string">
            <text:p>Análisis de sensibilidad bidimensiona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20" office:value-type="string" calcext:value-type="string" table:number-columns-spanned="11" table:number-rows-spanned="1">
            <text:p>valor de venta diesel B5</text:p>
          </table:table-cell>
          <table:covered-table-cell table:number-columns-repeated="10" table:style-name="ce33"/>
          <table:table-cell table:number-columns-repeated="5"/>
          <table:table-cell table:style-name="ce20" office:value-type="string" calcext:value-type="string" table:number-columns-spanned="11" table:number-rows-spanned="1">
            <text:p>Valor de venta gasohol 90</text:p>
          </table:table-cell>
          <table:covered-table-cell table:number-columns-repeated="10" table:style-name="ce33"/>
          <table:table-cell table:number-columns-repeated="4"/>
          <table:table-cell table:style-name="ce20" office:value-type="string" calcext:value-type="string" table:number-columns-spanned="11" table:number-rows-spanned="1">
            <text:p>Valor de venta gasohol 95</text:p>
          </table:table-cell>
          <table:covered-table-cell table:number-columns-repeated="10" table:style-name="ce33"/>
          <table:table-cell table:number-columns-repeated="16338"/>
        </table:table-row>
        <table:table-row table:style-name="ro1">
          <table:table-cell table:number-columns-repeated="4"/>
          <table:table-cell table:style-name="ce38" table:formula="of:=+[.$J$68]*(1+[.E69])" office:value-type="float" office:value="8.85188537741588" calcext:value-type="float">
            <text:p>8.852</text:p>
          </table:table-cell>
          <table:table-cell table:style-name="ce38" table:formula="of:=+[.$J$68]*(1+[.F69])" office:value-type="float" office:value="9.29222436046673" calcext:value-type="float">
            <text:p>9.292</text:p>
          </table:table-cell>
          <table:table-cell table:style-name="ce38" table:formula="of:=+[.$J$68]*(1+[.G69])" office:value-type="float" office:value="9.73256334351757" calcext:value-type="float">
            <text:p>9.733</text:p>
          </table:table-cell>
          <table:table-cell table:style-name="ce38" table:formula="of:=+[.$J$68]*(1+[.H69])" office:value-type="float" office:value="10.1277966101695" calcext:value-type="float">
            <text:p>10.128</text:p>
          </table:table-cell>
          <table:table-cell table:style-name="ce38" table:formula="of:=+[.$J$68]*(1+[.I69])" office:value-type="float" office:value="10.5681355932203" calcext:value-type="float">
            <text:p>10.568</text:p>
          </table:table-cell>
          <table:table-cell table:style-name="ce38" table:formula="of:=+[.D26]" office:value-type="float" office:value="11.0084745762712" calcext:value-type="float">
            <text:p>11.008</text:p>
          </table:table-cell>
          <table:table-cell table:style-name="ce38" table:formula="of:=+[.$J$68]*(1+[.K69])" office:value-type="float" office:value="11.448813559322" calcext:value-type="float">
            <text:p>11.449</text:p>
          </table:table-cell>
          <table:table-cell table:style-name="ce38" table:formula="of:=+[.$J$68]*(1+[.L69])" office:value-type="float" office:value="11.8891525423729" calcext:value-type="float">
            <text:p>11.889</text:p>
          </table:table-cell>
          <table:table-cell table:style-name="ce38" table:formula="of:=+[.$J$68]*(1+[.M69])" office:value-type="float" office:value="12.3294915254237" calcext:value-type="float">
            <text:p>12.329</text:p>
          </table:table-cell>
          <table:table-cell table:style-name="ce38" table:formula="of:=+[.$J$68]*(1+[.N69])" office:value-type="float" office:value="12.7698305084746" calcext:value-type="float">
            <text:p>12.770</text:p>
          </table:table-cell>
          <table:table-cell table:style-name="ce38" table:formula="of:=+[.$J$68]*(1+[.O69])" office:value-type="float" office:value="13.2101694915254" calcext:value-type="float">
            <text:p>13.210</text:p>
          </table:table-cell>
          <table:table-cell table:number-columns-repeated="5"/>
          <table:table-cell table:style-name="ce38" table:formula="of:=+[.$Z$68]*(1+[.U69])" office:value-type="float" office:value="8.55230084270161" calcext:value-type="float">
            <text:p>8.552</text:p>
          </table:table-cell>
          <table:table-cell table:style-name="ce38" table:formula="of:=+[.$Z$68]*(1+[.V69])" office:value-type="float" office:value="8.99413135117619" calcext:value-type="float">
            <text:p>8.994</text:p>
          </table:table-cell>
          <table:table-cell table:style-name="ce38" table:formula="of:=+[.$Z$68]*(1+[.W69])" office:value-type="float" office:value="9.43596185965076" calcext:value-type="float">
            <text:p>9.436</text:p>
          </table:table-cell>
          <table:table-cell table:style-name="ce38" table:formula="of:=+[.$Z$68]*(1+[.X69])" office:value-type="float" office:value="10.1621016949153" calcext:value-type="float">
            <text:p>10.162</text:p>
          </table:table-cell>
          <table:table-cell table:style-name="ce38" table:formula="of:=+[.$Z$68]*(1+[.Y69])" office:value-type="float" office:value="10.6039322033898" calcext:value-type="float">
            <text:p>10.604</text:p>
          </table:table-cell>
          <table:table-cell table:style-name="ce38" table:formula="of:=+[.K26]" office:value-type="float" office:value="11.0457627118644" calcext:value-type="float">
            <text:p>11.046</text:p>
          </table:table-cell>
          <table:table-cell table:style-name="ce38" table:formula="of:=+[.$Z$68]*(1+[.AA69])" office:value-type="float" office:value="11.487593220339" calcext:value-type="float">
            <text:p>11.488</text:p>
          </table:table-cell>
          <table:table-cell table:style-name="ce38" table:formula="of:=+[.$Z$68]*(1+[.AB69])" office:value-type="float" office:value="11.9294237288136" calcext:value-type="float">
            <text:p>11.929</text:p>
          </table:table-cell>
          <table:table-cell table:style-name="ce38" table:formula="of:=+[.$Z$68]*(1+[.AC69])" office:value-type="float" office:value="12.3712542372881" calcext:value-type="float">
            <text:p>12.371</text:p>
          </table:table-cell>
          <table:table-cell table:style-name="ce38" table:formula="of:=+[.$Z$68]*(1+[.AD69])" office:value-type="float" office:value="12.8130847457627" calcext:value-type="float">
            <text:p>12.813</text:p>
          </table:table-cell>
          <table:table-cell table:style-name="ce38" table:formula="of:=+[.$Z$68]*(1+[.AE69])" office:value-type="float" office:value="13.2549152542373" calcext:value-type="float">
            <text:p>13.255</text:p>
          </table:table-cell>
          <table:table-cell table:number-columns-repeated="4"/>
          <table:table-cell table:style-name="ce38" table:formula="of:=+[.$Z$68]*(1+[.AJ69])" office:value-type="float" office:value="8.5149452619307" calcext:value-type="float">
            <text:p>8.515</text:p>
          </table:table-cell>
          <table:table-cell table:style-name="ce38" table:formula="of:=+[.$Z$68]*(1+[.AK69])" office:value-type="float" office:value="8.95677577040528" calcext:value-type="float">
            <text:p>8.957</text:p>
          </table:table-cell>
          <table:table-cell table:style-name="ce38" table:formula="of:=+[.$Z$68]*(1+[.AL69])" office:value-type="float" office:value="9.39860627887985" calcext:value-type="float">
            <text:p>9.399</text:p>
          </table:table-cell>
          <table:table-cell table:style-name="ce38" table:formula="of:=+[.$Z$68]*(1+[.AM69])" office:value-type="float" office:value="10.1621016949153" calcext:value-type="float">
            <text:p>10.162</text:p>
          </table:table-cell>
          <table:table-cell table:style-name="ce38" table:formula="of:=+[.$Z$68]*(1+[.AN69])" office:value-type="float" office:value="10.6039322033898" calcext:value-type="float">
            <text:p>10.604</text:p>
          </table:table-cell>
          <table:table-cell table:style-name="ce38" table:formula="of:=+[.T26]" office:value-type="float" office:value="14.2300677966102" calcext:value-type="float">
            <text:p>14.230</text:p>
          </table:table-cell>
          <table:table-cell table:style-name="ce38" table:formula="of:=+[.$Z$68]*(1+[.AP69])" office:value-type="float" office:value="11.487593220339" calcext:value-type="float">
            <text:p>11.488</text:p>
          </table:table-cell>
          <table:table-cell table:style-name="ce38" table:formula="of:=+[.$Z$68]*(1+[.AQ69])" office:value-type="float" office:value="11.9294237288136" calcext:value-type="float">
            <text:p>11.929</text:p>
          </table:table-cell>
          <table:table-cell table:style-name="ce38" table:formula="of:=+[.$Z$68]*(1+[.AR69])" office:value-type="float" office:value="12.3712542372881" calcext:value-type="float">
            <text:p>12.371</text:p>
          </table:table-cell>
          <table:table-cell table:style-name="ce38" table:formula="of:=+[.$Z$68]*(1+[.AS69])" office:value-type="float" office:value="12.8130847457627" calcext:value-type="float">
            <text:p>12.813</text:p>
          </table:table-cell>
          <table:table-cell table:style-name="ce38" table:formula="of:=+[.$Z$68]*(1+[.AT69])" office:value-type="float" office:value="13.2549152542373" calcext:value-type="float">
            <text:p>13.255</text:p>
          </table:table-cell>
          <table:table-cell table:number-columns-repeated="16338"/>
        </table:table-row>
        <table:table-row table:style-name="ro1">
          <table:table-cell table:number-columns-repeated="3"/>
          <table:table-cell table:style-name="ce31" table:formula="of:=+[$Rentabilidad.C11]" office:value-type="float" office:value="463499.664810987" calcext:value-type="float">
            <text:p>463,500</text:p>
          </table:table-cell>
          <table:table-cell table:style-name="ce32" table:formula="of:=+[.E21]" office:value-type="percentage" office:value="-0.195902637001483" calcext:value-type="percentage">
            <text:p>-19.6%</text:p>
          </table:table-cell>
          <table:table-cell table:style-name="ce32" table:formula="of:=+[.E22]" office:value-type="percentage" office:value="-0.155902637001483" calcext:value-type="percentage">
            <text:p>-15.6%</text:p>
          </table:table-cell>
          <table:table-cell table:style-name="ce32" table:formula="of:=+[.E23]" office:value-type="percentage" office:value="-0.115902637001483" calcext:value-type="percentage">
            <text:p>-11.6%</text:p>
          </table:table-cell>
          <table:table-cell table:style-name="ce32" table:formula="of:=+[.E24]" office:value-type="percentage" office:value="-0.08" calcext:value-type="percentage">
            <text:p>-8.0%</text:p>
          </table:table-cell>
          <table:table-cell table:style-name="ce32" table:formula="of:=+[.E25]" office:value-type="percentage" office:value="-0.04" calcext:value-type="percentage">
            <text:p>-4.0%</text:p>
          </table:table-cell>
          <table:table-cell table:style-name="ce68" table:formula="of:=+[.E26]" office:value-type="percentage" office:value="0" calcext:value-type="percentage">
            <text:p>0 %</text:p>
          </table:table-cell>
          <table:table-cell table:style-name="ce32" table:formula="of:=+[.E27]" office:value-type="percentage" office:value="0.04" calcext:value-type="percentage">
            <text:p>4.0%</text:p>
          </table:table-cell>
          <table:table-cell table:style-name="ce32" table:formula="of:=+[.E28]" office:value-type="percentage" office:value="0.08" calcext:value-type="percentage">
            <text:p>8.0%</text:p>
          </table:table-cell>
          <table:table-cell table:style-name="ce32" table:formula="of:=+[.E45]" office:value-type="percentage" office:value="0.12" calcext:value-type="percentage">
            <text:p>12.0%</text:p>
          </table:table-cell>
          <table:table-cell table:style-name="ce32" table:formula="of:=+[.E30]" office:value-type="percentage" office:value="0.16" calcext:value-type="percentage">
            <text:p>16.0%</text:p>
          </table:table-cell>
          <table:table-cell table:style-name="ce32" table:formula="of:=+[.E31]" office:value-type="percentage" office:value="0.2" calcext:value-type="percentage">
            <text:p>20.0%</text:p>
          </table:table-cell>
          <table:table-cell table:number-columns-repeated="2"/>
          <table:table-cell table:style-name="ce17" office:value-type="string" calcext:value-type="string" table:number-columns-spanned="1" table:number-rows-spanned="12">
            <text:p>Valor de compra Gasohol 90</text:p>
          </table:table-cell>
          <table:table-cell/>
          <table:table-cell table:style-name="ce31" table:formula="of:=+[$Rentabilidad.C11]" office:value-type="float" office:value="316805.562538153" calcext:value-type="float">
            <text:p>316,806</text:p>
          </table:table-cell>
          <table:table-cell table:style-name="ce32" office:value-type="percentage" office:value="-0.225739220930804" calcext:value-type="percentage">
            <text:p>-22.6%</text:p>
          </table:table-cell>
          <table:table-cell table:style-name="ce32" office:value-type="percentage" office:value="-0.185739220930804" calcext:value-type="percentage">
            <text:p>-18.6%</text:p>
          </table:table-cell>
          <table:table-cell table:style-name="ce32" office:value-type="percentage" office:value="-0.145739220930804" calcext:value-type="percentage">
            <text:p>-14.6%</text:p>
          </table:table-cell>
          <table:table-cell table:style-name="ce32" office:value-type="percentage" office:value="-0.08" calcext:value-type="percentage">
            <text:p>-8.0%</text:p>
          </table:table-cell>
          <table:table-cell table:style-name="ce32" office:value-type="percentage" office:value="-0.04" calcext:value-type="percentage">
            <text:p>-4.0%</text:p>
          </table:table-cell>
          <table:table-cell table:style-name="ce68" office:value-type="percentage" office:value="0" calcext:value-type="percentage">
            <text:p>0 %</text:p>
          </table:table-cell>
          <table:table-cell table:style-name="ce32" office:value-type="percentage" office:value="0.04" calcext:value-type="percentage">
            <text:p>4.0%</text:p>
          </table:table-cell>
          <table:table-cell table:style-name="ce32" office:value-type="percentage" office:value="0.08" calcext:value-type="percentage">
            <text:p>8.0%</text:p>
          </table:table-cell>
          <table:table-cell table:style-name="ce32" office:value-type="percentage" office:value="0.12" calcext:value-type="percentage">
            <text:p>12.0%</text:p>
          </table:table-cell>
          <table:table-cell table:style-name="ce32" office:value-type="percentage" office:value="0.16" calcext:value-type="percentage">
            <text:p>16.0%</text:p>
          </table:table-cell>
          <table:table-cell table:style-name="ce32" office:value-type="percentage" office:value="0.2" calcext:value-type="percentage">
            <text:p>20.0%</text:p>
          </table:table-cell>
          <table:table-cell/>
          <table:table-cell table:style-name="ce17" office:value-type="string" calcext:value-type="string" table:number-columns-spanned="1" table:number-rows-spanned="12">
            <text:p>Valor de compra Gasohol 95</text:p>
          </table:table-cell>
          <table:table-cell/>
          <table:table-cell table:style-name="ce31" table:formula="of:=+[$Rentabilidad.C11]" office:value-type="float" office:value="316805.562538153" calcext:value-type="float">
            <text:p>316,806</text:p>
          </table:table-cell>
          <table:table-cell table:style-name="ce32" office:value-type="percentage" office:value="-0.22912111331301" calcext:value-type="percentage">
            <text:p>-22.9%</text:p>
          </table:table-cell>
          <table:table-cell table:style-name="ce32" office:value-type="percentage" office:value="-0.18912111331301" calcext:value-type="percentage">
            <text:p>-18.9%</text:p>
          </table:table-cell>
          <table:table-cell table:style-name="ce32" office:value-type="percentage" office:value="-0.14912111331301" calcext:value-type="percentage">
            <text:p>-14.9%</text:p>
          </table:table-cell>
          <table:table-cell table:style-name="ce32" office:value-type="percentage" office:value="-0.08" calcext:value-type="percentage">
            <text:p>-8.0%</text:p>
          </table:table-cell>
          <table:table-cell table:style-name="ce32" office:value-type="percentage" office:value="-0.04" calcext:value-type="percentage">
            <text:p>-4.0%</text:p>
          </table:table-cell>
          <table:table-cell table:style-name="ce68" office:value-type="percentage" office:value="0" calcext:value-type="percentage">
            <text:p>0 %</text:p>
          </table:table-cell>
          <table:table-cell table:style-name="ce32" office:value-type="percentage" office:value="0.04" calcext:value-type="percentage">
            <text:p>4.0%</text:p>
          </table:table-cell>
          <table:table-cell table:style-name="ce32" office:value-type="percentage" office:value="0.08" calcext:value-type="percentage">
            <text:p>8.0%</text:p>
          </table:table-cell>
          <table:table-cell table:style-name="ce32" office:value-type="percentage" office:value="0.12" calcext:value-type="percentage">
            <text:p>12.0%</text:p>
          </table:table-cell>
          <table:table-cell table:style-name="ce32" office:value-type="percentage" office:value="0.16" calcext:value-type="percentage">
            <text:p>16.0%</text:p>
          </table:table-cell>
          <table:table-cell table:style-name="ce32" office:value-type="percentage" office:value="0.2" calcext:value-type="percentage">
            <text:p>20.0%</text:p>
          </table:table-cell>
          <table:table-cell table:number-columns-repeated="16338"/>
        </table:table-row>
        <table:table-row table:style-name="ro1">
          <table:table-cell/>
          <table:table-cell table:style-name="ce17" office:value-type="string" calcext:value-type="string" table:number-columns-spanned="1" table:number-rows-spanned="11">
            <text:p>Valoe de compra diesel B5</text:p>
          </table:table-cell>
          <table:table-cell table:style-name="ce19" table:formula="of:=+[.D37]" office:value-type="float" office:value="6.45846421385713" calcext:value-type="float">
            <text:p>6.5</text:p>
          </table:table-cell>
          <table:table-cell table:style-name="ce32" table:formula="of:=+[.E37]" office:value-type="percentage" office:value="-0.198592168636478" calcext:value-type="percentage">
            <text:p>-19.9%</text:p>
          </table:table-cell>
          <table:table-cell table:style-name="ce39" table:formula="of:=MULTIPLE.OPERATIONS([.$D$69];[.$F$9];[.$D70];[.$F$6];[.E$69])" office:value-type="float" office:value="368259.482135626" calcext:value-type="float">
            <text:p>368,259</text:p>
          </table:table-cell>
          <table:table-cell table:style-name="ce39" table:formula="of:=MULTIPLE.OPERATIONS([.$D$69];[.$F$9];[.$D70];[.$F$6];[.F$69])" office:value-type="float" office:value="448741.954283067" calcext:value-type="float">
            <text:p>448,742</text:p>
          </table:table-cell>
          <table:table-cell table:style-name="ce39" table:formula="of:=MULTIPLE.OPERATIONS([.$D$69];[.$F$9];[.$D70];[.$F$6];[.G$69])" office:value-type="float" office:value="529224.426430508" calcext:value-type="float">
            <text:p>529,224</text:p>
          </table:table-cell>
          <table:table-cell table:style-name="ce39" table:formula="of:=MULTIPLE.OPERATIONS([.$D$69];[.$F$9];[.$D70];[.$F$6];[.H$69])" office:value-type="float" office:value="601462.750992797" calcext:value-type="float">
            <text:p>601,463</text:p>
          </table:table-cell>
          <table:table-cell table:style-name="ce39" table:formula="of:=MULTIPLE.OPERATIONS([.$D$69];[.$F$9];[.$D70];[.$F$6];[.I$69])" office:value-type="float" office:value="681945.223140237" calcext:value-type="float">
            <text:p>681,945</text:p>
          </table:table-cell>
          <table:table-cell table:style-name="ce39" table:formula="of:=MULTIPLE.OPERATIONS([.$D$69];[.$F$9];[.$D70];[.$F$6];[.J$69])" office:value-type="float" office:value="762427.695287679" calcext:value-type="float">
            <text:p>762,428</text:p>
          </table:table-cell>
          <table:table-cell table:style-name="ce39" table:formula="of:=MULTIPLE.OPERATIONS([.$D$69];[.$F$9];[.$D70];[.$F$6];[.K$69])" office:value-type="float" office:value="842910.16743512" calcext:value-type="float">
            <text:p>842,910</text:p>
          </table:table-cell>
          <table:table-cell table:style-name="ce39" table:formula="of:=MULTIPLE.OPERATIONS([.$D$69];[.$F$9];[.$D70];[.$F$6];[.L$69])" office:value-type="float" office:value="923392.639582561" calcext:value-type="float">
            <text:p>923,393</text:p>
          </table:table-cell>
          <table:table-cell table:style-name="ce39" table:formula="of:=MULTIPLE.OPERATIONS([.$D$69];[.$F$9];[.$D70];[.$F$6];[.M$69])" office:value-type="float" office:value="1003875.11173" calcext:value-type="float">
            <text:p>1,003,875</text:p>
          </table:table-cell>
          <table:table-cell table:style-name="ce39" table:formula="of:=MULTIPLE.OPERATIONS([.$D$69];[.$F$9];[.$D70];[.$F$6];[.N$69])" office:value-type="float" office:value="1084357.58387744" calcext:value-type="float">
            <text:p>1,084,358</text:p>
          </table:table-cell>
          <table:table-cell table:style-name="ce39" table:formula="of:=MULTIPLE.OPERATIONS([.$D$69];[.$F$9];[.$D70];[.$F$6];[.O$69])" office:value-type="float" office:value="1164840.05602488" calcext:value-type="float">
            <text:p>1,164,840</text:p>
          </table:table-cell>
          <table:table-cell table:number-columns-repeated="2"/>
          <table:covered-table-cell table:style-name="ce18"/>
          <table:table-cell table:style-name="ce19" table:formula="of:=+[.T37]" office:value-type="float" office:value="5.02346290080444" calcext:value-type="float">
            <text:p>5.0</text:p>
          </table:table-cell>
          <table:table-cell table:style-name="ce32" table:formula="of:=+[.L37]" office:value-type="percentage" office:value="-0.22912111331301" calcext:value-type="percentage">
            <text:p>-22.9%</text:p>
          </table:table-cell>
          <table:table-cell table:style-name="ce97" table:formula="of:=MULTIPLE.OPERATIONS([.$T$69];[.$F$10];[.$T70];[.$F$7];[.U$69])" office:value-type="float" office:value="380108.912849603" calcext:value-type="float">
            <text:p>380,109</text:p>
          </table:table-cell>
          <table:table-cell table:style-name="ce97" table:formula="of:=MULTIPLE.OPERATIONS([.$T$69];[.$F$10];[.$T70];[.$F$7];[.V$69])" office:value-type="float" office:value="297543.461717612" calcext:value-type="float">
            <text:p>297,543</text:p>
          </table:table-cell>
          <table:table-cell table:style-name="ce97" table:formula="of:=MULTIPLE.OPERATIONS([.$T$69];[.$F$10];[.$T70];[.$F$7];[.W$69])" office:value-type="float" office:value="361672.112858454" calcext:value-type="float">
            <text:p>361,672</text:p>
          </table:table-cell>
          <table:table-cell table:style-name="ce97" table:formula="of:=MULTIPLE.OPERATIONS([.$T$69];[.$F$10];[.$T70];[.$F$7];[.X$69])" office:value-type="float" office:value="467066.301992012" calcext:value-type="float">
            <text:p>467,066</text:p>
          </table:table-cell>
          <table:table-cell table:style-name="ce97" table:formula="of:=MULTIPLE.OPERATIONS([.$T$69];[.$F$10];[.$T70];[.$F$7];[.Y$69])" office:value-type="float" office:value="531194.953132854" calcext:value-type="float">
            <text:p>531,195</text:p>
          </table:table-cell>
          <table:table-cell table:style-name="ce97" table:formula="of:=MULTIPLE.OPERATIONS([.$T$69];[.$F$10];[.$T70];[.$F$7];[.Z$69])" office:value-type="float" office:value="595323.604273697" calcext:value-type="float">
            <text:p>595,324</text:p>
          </table:table-cell>
          <table:table-cell table:style-name="ce97" table:formula="of:=MULTIPLE.OPERATIONS([.$T$69];[.$F$10];[.$T70];[.$F$7];[.AA$69])" office:value-type="float" office:value="659452.25541454" calcext:value-type="float">
            <text:p>659,452</text:p>
          </table:table-cell>
          <table:table-cell table:style-name="ce97" table:formula="of:=MULTIPLE.OPERATIONS([.$T$69];[.$F$10];[.$T70];[.$F$7];[.AB$69])" office:value-type="float" office:value="723580.906555383" calcext:value-type="float">
            <text:p>723,581</text:p>
          </table:table-cell>
          <table:table-cell table:style-name="ce97" table:formula="of:=MULTIPLE.OPERATIONS([.$T$69];[.$F$10];[.$T70];[.$F$7];[.AC$69])" office:value-type="float" office:value="787709.557696225" calcext:value-type="float">
            <text:p>787,710</text:p>
          </table:table-cell>
          <table:table-cell table:style-name="ce97" table:formula="of:=MULTIPLE.OPERATIONS([.$T$69];[.$F$10];[.$T70];[.$F$7];[.AD$69])" office:value-type="float" office:value="851838.208837068" calcext:value-type="float">
            <text:p>851,838</text:p>
          </table:table-cell>
          <table:table-cell table:style-name="ce97" table:formula="of:=MULTIPLE.OPERATIONS([.$T$69];[.$F$10];[.$T70];[.$F$7];[.AE$69])" office:value-type="float" office:value="915966.859977911" calcext:value-type="float">
            <text:p>915,967</text:p>
          </table:table-cell>
          <table:table-cell/>
          <table:covered-table-cell table:style-name="ce18"/>
          <table:table-cell table:style-name="ce19" table:formula="of:=+[.T37]" office:value-type="float" office:value="5.02346290080444" calcext:value-type="float">
            <text:p>5.0</text:p>
          </table:table-cell>
          <table:table-cell table:style-name="ce32" table:formula="of:=+[.U37]" office:value-type="percentage" office:value="-0.22912111331301" calcext:value-type="percentage">
            <text:p>-22.9%</text:p>
          </table:table-cell>
          <table:table-cell table:style-name="ce109" table:formula="of:=MULTIPLE.OPERATIONS([.$AI$69];[.$F$11];[.$AI70];[.$F$8];[.AJ$69])" office:value-type="float" office:value="291933.193560387" calcext:value-type="float">
            <text:p>291933.2</text:p>
          </table:table-cell>
          <table:table-cell table:style-name="ce109" table:formula="of:=MULTIPLE.OPERATIONS([.$AI$69];[.$F$11];[.$AI70];[.$F$8];[.AK$69])" office:value-type="float" office:value="307925.552447232" calcext:value-type="float">
            <text:p>307925.6</text:p>
          </table:table-cell>
          <table:table-cell table:style-name="ce109" table:formula="of:=MULTIPLE.OPERATIONS([.$AI$69];[.$F$11];[.$AI70];[.$F$8];[.AL$69])" office:value-type="float" office:value="323917.911334076" calcext:value-type="float">
            <text:p>323917.9</text:p>
          </table:table-cell>
          <table:table-cell table:style-name="ce109" table:formula="of:=MULTIPLE.OPERATIONS([.$AI$69];[.$F$11];[.$AI70];[.$F$8];[.AM$69])" office:value-type="float" office:value="351553.152603074" calcext:value-type="float">
            <text:p>351553.2</text:p>
          </table:table-cell>
          <table:table-cell table:style-name="ce109" table:formula="of:=MULTIPLE.OPERATIONS([.$AI$69];[.$F$11];[.$AI70];[.$F$8];[.AN$69])" office:value-type="float" office:value="367545.511489919" calcext:value-type="float">
            <text:p>367545.5</text:p>
          </table:table-cell>
          <table:table-cell table:style-name="ce109" table:formula="of:=MULTIPLE.OPERATIONS([.$AI$69];[.$F$11];[.$AI70];[.$F$8];[.AO$69])" office:value-type="float" office:value="383537.870376764" calcext:value-type="float">
            <text:p>383537.9</text:p>
          </table:table-cell>
          <table:table-cell table:style-name="ce109" table:formula="of:=MULTIPLE.OPERATIONS([.$AI$69];[.$F$11];[.$AI70];[.$F$8];[.AP$69])" office:value-type="float" office:value="399530.229263608" calcext:value-type="float">
            <text:p>399530.2</text:p>
          </table:table-cell>
          <table:table-cell table:style-name="ce109" table:formula="of:=MULTIPLE.OPERATIONS([.$AI$69];[.$F$11];[.$AI70];[.$F$8];[.AQ$69])" office:value-type="float" office:value="415522.588150453" calcext:value-type="float">
            <text:p>415522.6</text:p>
          </table:table-cell>
          <table:table-cell table:style-name="ce109" table:formula="of:=MULTIPLE.OPERATIONS([.$AI$69];[.$F$11];[.$AI70];[.$F$8];[.AR$69])" office:value-type="float" office:value="431514.947037298" calcext:value-type="float">
            <text:p>431514.9</text:p>
          </table:table-cell>
          <table:table-cell table:style-name="ce109" table:formula="of:=MULTIPLE.OPERATIONS([.$AI$69];[.$F$11];[.$AI70];[.$F$8];[.AS$69])" office:value-type="float" office:value="447507.305924142" calcext:value-type="float">
            <text:p>447507.3</text:p>
          </table:table-cell>
          <table:table-cell table:style-name="ce109" table:formula="of:=MULTIPLE.OPERATIONS([.$AI$69];[.$F$11];[.$AI70];[.$F$8];[.AT$69])" office:value-type="float" office:value="463499.664810987" calcext:value-type="float">
            <text:p>463499.7</text:p>
          </table:table-cell>
          <table:table-cell table:number-columns-repeated="16338"/>
        </table:table-row>
        <table:table-row table:style-name="ro1">
          <table:table-cell/>
          <table:covered-table-cell table:style-name="ce18"/>
          <table:table-cell table:style-name="ce19" table:formula="of:=+[.D38]" office:value-type="float" office:value="6.78082014606052" calcext:value-type="float">
            <text:p>6.8</text:p>
          </table:table-cell>
          <table:table-cell table:style-name="ce32" table:formula="of:=+[.E38]" office:value-type="percentage" office:value="-0.158592168636478" calcext:value-type="percentage">
            <text:p>-15.9%</text:p>
          </table:table-cell>
          <table:table-cell table:style-name="ce39" table:formula="of:=MULTIPLE.OPERATIONS([.$D$69];[.$F$9];[.$D71];[.$F$6];[.E$69])" office:value-type="float" office:value="308050.052422639" calcext:value-type="float">
            <text:p>308,050</text:p>
          </table:table-cell>
          <table:table-cell table:style-name="ce39" table:formula="of:=MULTIPLE.OPERATIONS([.$D$69];[.$F$9];[.$D71];[.$F$6];[.F$69])" office:value-type="float" office:value="388532.52457008" calcext:value-type="float">
            <text:p>388,533</text:p>
          </table:table-cell>
          <table:table-cell table:style-name="ce39" table:formula="of:=MULTIPLE.OPERATIONS([.$D$69];[.$F$9];[.$D71];[.$F$6];[.G$69])" office:value-type="float" office:value="469014.996717521" calcext:value-type="float">
            <text:p>469,015</text:p>
          </table:table-cell>
          <table:table-cell table:style-name="ce39" table:formula="of:=MULTIPLE.OPERATIONS([.$D$69];[.$F$9];[.$D71];[.$F$6];[.H$69])" office:value-type="float" office:value="541253.32127981" calcext:value-type="float">
            <text:p>541,253</text:p>
          </table:table-cell>
          <table:table-cell table:style-name="ce39" table:formula="of:=MULTIPLE.OPERATIONS([.$D$69];[.$F$9];[.$D71];[.$F$6];[.I$69])" office:value-type="float" office:value="621735.793427251" calcext:value-type="float">
            <text:p>621,736</text:p>
          </table:table-cell>
          <table:table-cell table:style-name="ce39" table:formula="of:=MULTIPLE.OPERATIONS([.$D$69];[.$F$9];[.$D71];[.$F$6];[.J$69])" office:value-type="float" office:value="702218.265574692" calcext:value-type="float">
            <text:p>702,218</text:p>
          </table:table-cell>
          <table:table-cell table:style-name="ce39" table:formula="of:=MULTIPLE.OPERATIONS([.$D$69];[.$F$9];[.$D71];[.$F$6];[.K$69])" office:value-type="float" office:value="782700.737722133" calcext:value-type="float">
            <text:p>782,701</text:p>
          </table:table-cell>
          <table:table-cell table:style-name="ce39" table:formula="of:=MULTIPLE.OPERATIONS([.$D$69];[.$F$9];[.$D71];[.$F$6];[.L$69])" office:value-type="float" office:value="863183.209869574" calcext:value-type="float">
            <text:p>863,183</text:p>
          </table:table-cell>
          <table:table-cell table:style-name="ce39" table:formula="of:=MULTIPLE.OPERATIONS([.$D$69];[.$F$9];[.$D71];[.$F$6];[.M$69])" office:value-type="float" office:value="943665.682017015" calcext:value-type="float">
            <text:p>943,666</text:p>
          </table:table-cell>
          <table:table-cell table:style-name="ce39" table:formula="of:=MULTIPLE.OPERATIONS([.$D$69];[.$F$9];[.$D71];[.$F$6];[.N$69])" office:value-type="float" office:value="1024148.15416446" calcext:value-type="float">
            <text:p>1,024,148</text:p>
          </table:table-cell>
          <table:table-cell table:style-name="ce39" table:formula="of:=MULTIPLE.OPERATIONS([.$D$69];[.$F$9];[.$D71];[.$F$6];[.O$69])" office:value-type="float" office:value="1104630.6263119" calcext:value-type="float">
            <text:p>1,104,631</text:p>
          </table:table-cell>
          <table:table-cell table:number-columns-repeated="2"/>
          <table:covered-table-cell table:style-name="ce18"/>
          <table:table-cell table:style-name="ce19" table:formula="of:=+[.T38]" office:value-type="float" office:value="5.28412449045538" calcext:value-type="float">
            <text:p>5.3</text:p>
          </table:table-cell>
          <table:table-cell table:style-name="ce32" table:formula="of:=+[.L38]" office:value-type="percentage" office:value="-0.18912111331301" calcext:value-type="percentage">
            <text:p>-18.9%</text:p>
          </table:table-cell>
          <table:table-cell table:style-name="ce97" table:formula="of:=MULTIPLE.OPERATIONS([.$T$69];[.$F$10];[.$T71];[.$F$7];[.U$69])" office:value-type="float" office:value="331485.189316093" calcext:value-type="float">
            <text:p>331,485</text:p>
          </table:table-cell>
          <table:table-cell table:style-name="ce97" table:formula="of:=MULTIPLE.OPERATIONS([.$T$69];[.$F$10];[.$T71];[.$F$7];[.V$69])" office:value-type="float" office:value="248919.738184102" calcext:value-type="float">
            <text:p>248,920</text:p>
          </table:table-cell>
          <table:table-cell table:style-name="ce97" table:formula="of:=MULTIPLE.OPERATIONS([.$T$69];[.$F$10];[.$T71];[.$F$7];[.W$69])" office:value-type="float" office:value="313048.389324944" calcext:value-type="float">
            <text:p>313,048</text:p>
          </table:table-cell>
          <table:table-cell table:style-name="ce97" table:formula="of:=MULTIPLE.OPERATIONS([.$T$69];[.$F$10];[.$T71];[.$F$7];[.X$69])" office:value-type="float" office:value="418442.578458502" calcext:value-type="float">
            <text:p>418,443</text:p>
          </table:table-cell>
          <table:table-cell table:style-name="ce97" table:formula="of:=MULTIPLE.OPERATIONS([.$T$69];[.$F$10];[.$T71];[.$F$7];[.Y$69])" office:value-type="float" office:value="482571.229599345" calcext:value-type="float">
            <text:p>482,571</text:p>
          </table:table-cell>
          <table:table-cell table:style-name="ce97" table:formula="of:=MULTIPLE.OPERATIONS([.$T$69];[.$F$10];[.$T71];[.$F$7];[.Z$69])" office:value-type="float" office:value="546699.880740187" calcext:value-type="float">
            <text:p>546,700</text:p>
          </table:table-cell>
          <table:table-cell table:style-name="ce97" table:formula="of:=MULTIPLE.OPERATIONS([.$T$69];[.$F$10];[.$T71];[.$F$7];[.AA$69])" office:value-type="float" office:value="610828.53188103" calcext:value-type="float">
            <text:p>610,829</text:p>
          </table:table-cell>
          <table:table-cell table:style-name="ce97" table:formula="of:=MULTIPLE.OPERATIONS([.$T$69];[.$F$10];[.$T71];[.$F$7];[.AB$69])" office:value-type="float" office:value="674957.183021873" calcext:value-type="float">
            <text:p>674,957</text:p>
          </table:table-cell>
          <table:table-cell table:style-name="ce97" table:formula="of:=MULTIPLE.OPERATIONS([.$T$69];[.$F$10];[.$T71];[.$F$7];[.AC$69])" office:value-type="float" office:value="739085.834162716" calcext:value-type="float">
            <text:p>739,086</text:p>
          </table:table-cell>
          <table:table-cell table:style-name="ce97" table:formula="of:=MULTIPLE.OPERATIONS([.$T$69];[.$F$10];[.$T71];[.$F$7];[.AD$69])" office:value-type="float" office:value="803214.485303558" calcext:value-type="float">
            <text:p>803,214</text:p>
          </table:table-cell>
          <table:table-cell table:style-name="ce97" table:formula="of:=MULTIPLE.OPERATIONS([.$T$69];[.$F$10];[.$T71];[.$F$7];[.AE$69])" office:value-type="float" office:value="867343.136444401" calcext:value-type="float">
            <text:p>867,343</text:p>
          </table:table-cell>
          <table:table-cell/>
          <table:covered-table-cell table:style-name="ce18"/>
          <table:table-cell table:style-name="ce19" table:formula="of:=+[.T38]" office:value-type="float" office:value="5.28412449045538" calcext:value-type="float">
            <text:p>5.3</text:p>
          </table:table-cell>
          <table:table-cell table:style-name="ce32" table:formula="of:=+[.U38]" office:value-type="percentage" office:value="-0.18912111331301" calcext:value-type="percentage">
            <text:p>-18.9%</text:p>
          </table:table-cell>
          <table:table-cell table:style-name="ce109" table:formula="of:=MULTIPLE.OPERATIONS([.$AI$69];[.$F$11];[.$AI71];[.$F$8];[.AJ$69])" office:value-type="float" office:value="280283.056761785" calcext:value-type="float">
            <text:p>280283.1</text:p>
          </table:table-cell>
          <table:table-cell table:style-name="ce109" table:formula="of:=MULTIPLE.OPERATIONS([.$AI$69];[.$F$11];[.$AI71];[.$F$8];[.AK$69])" office:value-type="float" office:value="296275.41564863" calcext:value-type="float">
            <text:p>296275.4</text:p>
          </table:table-cell>
          <table:table-cell table:style-name="ce109" table:formula="of:=MULTIPLE.OPERATIONS([.$AI$69];[.$F$11];[.$AI71];[.$F$8];[.AL$69])" office:value-type="float" office:value="312267.774535475" calcext:value-type="float">
            <text:p>312267.8</text:p>
          </table:table-cell>
          <table:table-cell table:style-name="ce109" table:formula="of:=MULTIPLE.OPERATIONS([.$AI$69];[.$F$11];[.$AI71];[.$F$8];[.AM$69])" office:value-type="float" office:value="339903.015804473" calcext:value-type="float">
            <text:p>339903.0</text:p>
          </table:table-cell>
          <table:table-cell table:style-name="ce109" table:formula="of:=MULTIPLE.OPERATIONS([.$AI$69];[.$F$11];[.$AI71];[.$F$8];[.AN$69])" office:value-type="float" office:value="355895.374691317" calcext:value-type="float">
            <text:p>355895.4</text:p>
          </table:table-cell>
          <table:table-cell table:style-name="ce109" table:formula="of:=MULTIPLE.OPERATIONS([.$AI$69];[.$F$11];[.$AI71];[.$F$8];[.AO$69])" office:value-type="float" office:value="371887.733578162" calcext:value-type="float">
            <text:p>371887.7</text:p>
          </table:table-cell>
          <table:table-cell table:style-name="ce109" table:formula="of:=MULTIPLE.OPERATIONS([.$AI$69];[.$F$11];[.$AI71];[.$F$8];[.AP$69])" office:value-type="float" office:value="387880.092465007" calcext:value-type="float">
            <text:p>387880.1</text:p>
          </table:table-cell>
          <table:table-cell table:style-name="ce109" table:formula="of:=MULTIPLE.OPERATIONS([.$AI$69];[.$F$11];[.$AI71];[.$F$8];[.AQ$69])" office:value-type="float" office:value="403872.451351852" calcext:value-type="float">
            <text:p>403872.5</text:p>
          </table:table-cell>
          <table:table-cell table:style-name="ce109" table:formula="of:=MULTIPLE.OPERATIONS([.$AI$69];[.$F$11];[.$AI71];[.$F$8];[.AR$69])" office:value-type="float" office:value="419864.810238696" calcext:value-type="float">
            <text:p>419864.8</text:p>
          </table:table-cell>
          <table:table-cell table:style-name="ce109" table:formula="of:=MULTIPLE.OPERATIONS([.$AI$69];[.$F$11];[.$AI71];[.$F$8];[.AS$69])" office:value-type="float" office:value="435857.169125541" calcext:value-type="float">
            <text:p>435857.2</text:p>
          </table:table-cell>
          <table:table-cell table:style-name="ce109" table:formula="of:=MULTIPLE.OPERATIONS([.$AI$69];[.$F$11];[.$AI71];[.$F$8];[.AT$69])" office:value-type="float" office:value="463499.664810987" calcext:value-type="float">
            <text:p>463499.7</text:p>
          </table:table-cell>
          <table:table-cell table:number-columns-repeated="16338"/>
        </table:table-row>
        <table:table-row table:style-name="ro1">
          <table:table-cell/>
          <table:covered-table-cell table:style-name="ce18"/>
          <table:table-cell table:style-name="ce19" table:formula="of:=+[.D39]" office:value-type="float" office:value="7.10317607826391" calcext:value-type="float">
            <text:p>7.1</text:p>
          </table:table-cell>
          <table:table-cell table:style-name="ce32" table:formula="of:=+[.E39]" office:value-type="percentage" office:value="-0.118592168636478" calcext:value-type="percentage">
            <text:p>-11.9%</text:p>
          </table:table-cell>
          <table:table-cell table:style-name="ce39" table:formula="of:=MULTIPLE.OPERATIONS([.$D$69];[.$F$9];[.$D72];[.$F$6];[.E$69])" office:value-type="float" office:value="247840.622709652" calcext:value-type="float">
            <text:p>247,841</text:p>
          </table:table-cell>
          <table:table-cell table:style-name="ce39" table:formula="of:=MULTIPLE.OPERATIONS([.$D$69];[.$F$9];[.$D72];[.$F$6];[.F$69])" office:value-type="float" office:value="328323.094857093" calcext:value-type="float">
            <text:p>328,323</text:p>
          </table:table-cell>
          <table:table-cell table:style-name="ce39" table:formula="of:=MULTIPLE.OPERATIONS([.$D$69];[.$F$9];[.$D72];[.$F$6];[.G$69])" office:value-type="float" office:value="408805.567004535" calcext:value-type="float">
            <text:p>408,806</text:p>
          </table:table-cell>
          <table:table-cell table:style-name="ce39" table:formula="of:=MULTIPLE.OPERATIONS([.$D$69];[.$F$9];[.$D72];[.$F$6];[.H$69])" office:value-type="float" office:value="481043.891566823" calcext:value-type="float">
            <text:p>481,044</text:p>
          </table:table-cell>
          <table:table-cell table:style-name="ce39" table:formula="of:=MULTIPLE.OPERATIONS([.$D$69];[.$F$9];[.$D72];[.$F$6];[.I$69])" office:value-type="float" office:value="561526.363714264" calcext:value-type="float">
            <text:p>561,526</text:p>
          </table:table-cell>
          <table:table-cell table:style-name="ce39" table:formula="of:=MULTIPLE.OPERATIONS([.$D$69];[.$F$9];[.$D72];[.$F$6];[.J$69])" office:value-type="float" office:value="642008.835861705" calcext:value-type="float">
            <text:p>642,009</text:p>
          </table:table-cell>
          <table:table-cell table:style-name="ce39" table:formula="of:=MULTIPLE.OPERATIONS([.$D$69];[.$F$9];[.$D72];[.$F$6];[.K$69])" office:value-type="float" office:value="722491.308009146" calcext:value-type="float">
            <text:p>722,491</text:p>
          </table:table-cell>
          <table:table-cell table:style-name="ce39" table:formula="of:=MULTIPLE.OPERATIONS([.$D$69];[.$F$9];[.$D72];[.$F$6];[.L$69])" office:value-type="float" office:value="802973.780156587" calcext:value-type="float">
            <text:p>802,974</text:p>
          </table:table-cell>
          <table:table-cell table:style-name="ce39" table:formula="of:=MULTIPLE.OPERATIONS([.$D$69];[.$F$9];[.$D72];[.$F$6];[.M$69])" office:value-type="float" office:value="883456.252304029" calcext:value-type="float">
            <text:p>883,456</text:p>
          </table:table-cell>
          <table:table-cell table:style-name="ce39" table:formula="of:=MULTIPLE.OPERATIONS([.$D$69];[.$F$9];[.$D72];[.$F$6];[.N$69])" office:value-type="float" office:value="963938.724451469" calcext:value-type="float">
            <text:p>963,939</text:p>
          </table:table-cell>
          <table:table-cell table:style-name="ce39" table:formula="of:=MULTIPLE.OPERATIONS([.$D$69];[.$F$9];[.$D72];[.$F$6];[.O$69])" office:value-type="float" office:value="1044421.19659891" calcext:value-type="float">
            <text:p>1,044,421</text:p>
          </table:table-cell>
          <table:table-cell table:number-columns-repeated="2"/>
          <table:covered-table-cell table:style-name="ce18"/>
          <table:table-cell table:style-name="ce19" table:formula="of:=+[.T39]" office:value-type="float" office:value="5.54478608010632" calcext:value-type="float">
            <text:p>5.5</text:p>
          </table:table-cell>
          <table:table-cell table:style-name="ce32" table:formula="of:=+[.L39]" office:value-type="percentage" office:value="-0.14912111331301" calcext:value-type="percentage">
            <text:p>-14.9%</text:p>
          </table:table-cell>
          <table:table-cell table:style-name="ce97" table:formula="of:=MULTIPLE.OPERATIONS([.$T$69];[.$F$10];[.$T72];[.$F$7];[.U$69])" office:value-type="float" office:value="282861.465782583" calcext:value-type="float">
            <text:p>282,861</text:p>
          </table:table-cell>
          <table:table-cell table:style-name="ce97" table:formula="of:=MULTIPLE.OPERATIONS([.$T$69];[.$F$10];[.$T72];[.$F$7];[.V$69])" office:value-type="float" office:value="200296.014650592" calcext:value-type="float">
            <text:p>200,296</text:p>
          </table:table-cell>
          <table:table-cell table:style-name="ce97" table:formula="of:=MULTIPLE.OPERATIONS([.$T$69];[.$F$10];[.$T72];[.$F$7];[.W$69])" office:value-type="float" office:value="264424.665791435" calcext:value-type="float">
            <text:p>264,425</text:p>
          </table:table-cell>
          <table:table-cell table:style-name="ce97" table:formula="of:=MULTIPLE.OPERATIONS([.$T$69];[.$F$10];[.$T72];[.$F$7];[.X$69])" office:value-type="float" office:value="369818.854924992" calcext:value-type="float">
            <text:p>369,819</text:p>
          </table:table-cell>
          <table:table-cell table:style-name="ce97" table:formula="of:=MULTIPLE.OPERATIONS([.$T$69];[.$F$10];[.$T72];[.$F$7];[.Y$69])" office:value-type="float" office:value="433947.506065835" calcext:value-type="float">
            <text:p>433,948</text:p>
          </table:table-cell>
          <table:table-cell table:style-name="ce97" table:formula="of:=MULTIPLE.OPERATIONS([.$T$69];[.$F$10];[.$T72];[.$F$7];[.Z$69])" office:value-type="float" office:value="498076.157206678" calcext:value-type="float">
            <text:p>498,076</text:p>
          </table:table-cell>
          <table:table-cell table:style-name="ce97" table:formula="of:=MULTIPLE.OPERATIONS([.$T$69];[.$F$10];[.$T72];[.$F$7];[.AA$69])" office:value-type="float" office:value="562204.808347521" calcext:value-type="float">
            <text:p>562,205</text:p>
          </table:table-cell>
          <table:table-cell table:style-name="ce97" table:formula="of:=MULTIPLE.OPERATIONS([.$T$69];[.$F$10];[.$T72];[.$F$7];[.AB$69])" office:value-type="float" office:value="626333.459488363" calcext:value-type="float">
            <text:p>626,333</text:p>
          </table:table-cell>
          <table:table-cell table:style-name="ce97" table:formula="of:=MULTIPLE.OPERATIONS([.$T$69];[.$F$10];[.$T72];[.$F$7];[.AC$69])" office:value-type="float" office:value="690462.110629206" calcext:value-type="float">
            <text:p>690,462</text:p>
          </table:table-cell>
          <table:table-cell table:style-name="ce97" table:formula="of:=MULTIPLE.OPERATIONS([.$T$69];[.$F$10];[.$T72];[.$F$7];[.AD$69])" office:value-type="float" office:value="754590.761770048" calcext:value-type="float">
            <text:p>754,591</text:p>
          </table:table-cell>
          <table:table-cell table:style-name="ce97" table:formula="of:=MULTIPLE.OPERATIONS([.$T$69];[.$F$10];[.$T72];[.$F$7];[.AE$69])" office:value-type="float" office:value="818719.412910891" calcext:value-type="float">
            <text:p>818,719</text:p>
          </table:table-cell>
          <table:table-cell/>
          <table:covered-table-cell table:style-name="ce18"/>
          <table:table-cell table:style-name="ce19" table:formula="of:=+[.T39]" office:value-type="float" office:value="5.54478608010632" calcext:value-type="float">
            <text:p>5.5</text:p>
          </table:table-cell>
          <table:table-cell table:style-name="ce32" table:formula="of:=+[.U39]" office:value-type="percentage" office:value="-0.14912111331301" calcext:value-type="percentage">
            <text:p>-14.9%</text:p>
          </table:table-cell>
          <table:table-cell table:style-name="ce109" table:formula="of:=MULTIPLE.OPERATIONS([.$AI$69];[.$F$11];[.$AI72];[.$F$8];[.AJ$69])" office:value-type="float" office:value="268632.919963184" calcext:value-type="float">
            <text:p>268632.9</text:p>
          </table:table-cell>
          <table:table-cell table:style-name="ce109" table:formula="of:=MULTIPLE.OPERATIONS([.$AI$69];[.$F$11];[.$AI72];[.$F$8];[.AK$69])" office:value-type="float" office:value="284625.278850029" calcext:value-type="float">
            <text:p>284625.3</text:p>
          </table:table-cell>
          <table:table-cell table:style-name="ce109" table:formula="of:=MULTIPLE.OPERATIONS([.$AI$69];[.$F$11];[.$AI72];[.$F$8];[.AL$69])" office:value-type="float" office:value="300617.637736873" calcext:value-type="float">
            <text:p>300617.6</text:p>
          </table:table-cell>
          <table:table-cell table:style-name="ce109" table:formula="of:=MULTIPLE.OPERATIONS([.$AI$69];[.$F$11];[.$AI72];[.$F$8];[.AM$69])" office:value-type="float" office:value="328252.879005871" calcext:value-type="float">
            <text:p>328252.9</text:p>
          </table:table-cell>
          <table:table-cell table:style-name="ce109" table:formula="of:=MULTIPLE.OPERATIONS([.$AI$69];[.$F$11];[.$AI72];[.$F$8];[.AN$69])" office:value-type="float" office:value="344245.237892716" calcext:value-type="float">
            <text:p>344245.2</text:p>
          </table:table-cell>
          <table:table-cell table:style-name="ce109" table:formula="of:=MULTIPLE.OPERATIONS([.$AI$69];[.$F$11];[.$AI72];[.$F$8];[.AO$69])" office:value-type="float" office:value="360237.596779561" calcext:value-type="float">
            <text:p>360237.6</text:p>
          </table:table-cell>
          <table:table-cell table:style-name="ce109" table:formula="of:=MULTIPLE.OPERATIONS([.$AI$69];[.$F$11];[.$AI72];[.$F$8];[.AP$69])" office:value-type="float" office:value="376229.955666405" calcext:value-type="float">
            <text:p>376230.0</text:p>
          </table:table-cell>
          <table:table-cell table:style-name="ce109" table:formula="of:=MULTIPLE.OPERATIONS([.$AI$69];[.$F$11];[.$AI72];[.$F$8];[.AQ$69])" office:value-type="float" office:value="392222.31455325" calcext:value-type="float">
            <text:p>392222.3</text:p>
          </table:table-cell>
          <table:table-cell table:style-name="ce109" table:formula="of:=MULTIPLE.OPERATIONS([.$AI$69];[.$F$11];[.$AI72];[.$F$8];[.AR$69])" office:value-type="float" office:value="408214.673440095" calcext:value-type="float">
            <text:p>408214.7</text:p>
          </table:table-cell>
          <table:table-cell table:style-name="ce109" table:formula="of:=MULTIPLE.OPERATIONS([.$AI$69];[.$F$11];[.$AI72];[.$F$8];[.AS$69])" office:value-type="float" office:value="424207.032326939" calcext:value-type="float">
            <text:p>424207.0</text:p>
          </table:table-cell>
          <table:table-cell table:style-name="ce109" table:formula="of:=MULTIPLE.OPERATIONS([.$AI$69];[.$F$11];[.$AI72];[.$F$8];[.AT$69])" office:value-type="float" office:value="463499.664810987" calcext:value-type="float">
            <text:p>463499.7</text:p>
          </table:table-cell>
          <table:table-cell table:number-columns-repeated="16338"/>
        </table:table-row>
        <table:table-row table:style-name="ro1">
          <table:table-cell/>
          <table:covered-table-cell table:style-name="ce18"/>
          <table:table-cell table:style-name="ce19" table:formula="of:=+[.D40]" office:value-type="float" office:value="7.41418644067797" calcext:value-type="float">
            <text:p>7.4</text:p>
          </table:table-cell>
          <table:table-cell table:style-name="ce32" table:formula="of:=+[.E40]" office:value-type="percentage" office:value="-0.08" calcext:value-type="percentage">
            <text:p>-8.0%</text:p>
          </table:table-cell>
          <table:table-cell table:style-name="ce39" table:formula="of:=MULTIPLE.OPERATIONS([.$D$69];[.$F$9];[.$D73];[.$F$6];[.E$69])" office:value-type="float" office:value="189750.311084908" calcext:value-type="float">
            <text:p>189,750</text:p>
          </table:table-cell>
          <table:table-cell table:style-name="ce39" table:formula="of:=MULTIPLE.OPERATIONS([.$D$69];[.$F$9];[.$D73];[.$F$6];[.F$69])" office:value-type="float" office:value="270232.783232349" calcext:value-type="float">
            <text:p>270,233</text:p>
          </table:table-cell>
          <table:table-cell table:style-name="ce39" table:formula="of:=MULTIPLE.OPERATIONS([.$D$69];[.$F$9];[.$D73];[.$F$6];[.G$69])" office:value-type="float" office:value="350715.25537979" calcext:value-type="float">
            <text:p>350,715</text:p>
          </table:table-cell>
          <table:table-cell table:style-name="ce39" table:formula="of:=MULTIPLE.OPERATIONS([.$D$69];[.$F$9];[.$D73];[.$F$6];[.H$69])" office:value-type="float" office:value="422953.579942079" calcext:value-type="float">
            <text:p>422,954</text:p>
          </table:table-cell>
          <table:table-cell table:style-name="ce39" table:formula="of:=MULTIPLE.OPERATIONS([.$D$69];[.$F$9];[.$D73];[.$F$6];[.I$69])" office:value-type="float" office:value="503436.05208952" calcext:value-type="float">
            <text:p>503,436</text:p>
          </table:table-cell>
          <table:table-cell table:style-name="ce39" table:formula="of:=MULTIPLE.OPERATIONS([.$D$69];[.$F$9];[.$D73];[.$F$6];[.J$69])" office:value-type="float" office:value="583918.524236961" calcext:value-type="float">
            <text:p>583,919</text:p>
          </table:table-cell>
          <table:table-cell table:style-name="ce39" table:formula="of:=MULTIPLE.OPERATIONS([.$D$69];[.$F$9];[.$D73];[.$F$6];[.K$69])" office:value-type="float" office:value="664400.996384402" calcext:value-type="float">
            <text:p>664,401</text:p>
          </table:table-cell>
          <table:table-cell table:style-name="ce39" table:formula="of:=MULTIPLE.OPERATIONS([.$D$69];[.$F$9];[.$D73];[.$F$6];[.L$69])" office:value-type="float" office:value="744883.468531843" calcext:value-type="float">
            <text:p>744,883</text:p>
          </table:table-cell>
          <table:table-cell table:style-name="ce39" table:formula="of:=MULTIPLE.OPERATIONS([.$D$69];[.$F$9];[.$D73];[.$F$6];[.M$69])" office:value-type="float" office:value="825365.940679284" calcext:value-type="float">
            <text:p>825,366</text:p>
          </table:table-cell>
          <table:table-cell table:style-name="ce39" table:formula="of:=MULTIPLE.OPERATIONS([.$D$69];[.$F$9];[.$D73];[.$F$6];[.N$69])" office:value-type="float" office:value="905848.412826725" calcext:value-type="float">
            <text:p>905,848</text:p>
          </table:table-cell>
          <table:table-cell table:style-name="ce39" table:formula="of:=MULTIPLE.OPERATIONS([.$D$69];[.$F$9];[.$D73];[.$F$6];[.O$69])" office:value-type="float" office:value="986330.884974166" calcext:value-type="float">
            <text:p>986,331</text:p>
          </table:table-cell>
          <table:table-cell table:number-columns-repeated="2"/>
          <table:covered-table-cell table:style-name="ce18"/>
          <table:table-cell table:style-name="ce19" table:formula="of:=+[.T40]" office:value-type="float" office:value="5.99521656197162" calcext:value-type="float">
            <text:p>6.0</text:p>
          </table:table-cell>
          <table:table-cell table:style-name="ce32" table:formula="of:=+[.L40]" office:value-type="percentage" office:value="-0.08" calcext:value-type="percentage">
            <text:p>-8.0%</text:p>
          </table:table-cell>
          <table:table-cell table:style-name="ce97" table:formula="of:=MULTIPLE.OPERATIONS([.$T$69];[.$F$10];[.$T73];[.$F$7];[.U$69])" office:value-type="float" office:value="198838.318181078" calcext:value-type="float">
            <text:p>198,838</text:p>
          </table:table-cell>
          <table:table-cell table:style-name="ce97" table:formula="of:=MULTIPLE.OPERATIONS([.$T$69];[.$F$10];[.$T73];[.$F$7];[.V$69])" office:value-type="float" office:value="116272.867049087" calcext:value-type="float">
            <text:p>116,273</text:p>
          </table:table-cell>
          <table:table-cell table:style-name="ce97" table:formula="of:=MULTIPLE.OPERATIONS([.$T$69];[.$F$10];[.$T73];[.$F$7];[.W$69])" office:value-type="float" office:value="180401.518189929" calcext:value-type="float">
            <text:p>180,402</text:p>
          </table:table-cell>
          <table:table-cell table:style-name="ce97" table:formula="of:=MULTIPLE.OPERATIONS([.$T$69];[.$F$10];[.$T73];[.$F$7];[.X$69])" office:value-type="float" office:value="285795.707323487" calcext:value-type="float">
            <text:p>285,796</text:p>
          </table:table-cell>
          <table:table-cell table:style-name="ce97" table:formula="of:=MULTIPLE.OPERATIONS([.$T$69];[.$F$10];[.$T73];[.$F$7];[.Y$69])" office:value-type="float" office:value="349924.35846433" calcext:value-type="float">
            <text:p>349,924</text:p>
          </table:table-cell>
          <table:table-cell table:style-name="ce97" table:formula="of:=MULTIPLE.OPERATIONS([.$T$69];[.$F$10];[.$T73];[.$F$7];[.Z$69])" office:value-type="float" office:value="414053.009605173" calcext:value-type="float">
            <text:p>414,053</text:p>
          </table:table-cell>
          <table:table-cell table:style-name="ce97" table:formula="of:=MULTIPLE.OPERATIONS([.$T$69];[.$F$10];[.$T73];[.$F$7];[.AA$69])" office:value-type="float" office:value="478181.660746016" calcext:value-type="float">
            <text:p>478,182</text:p>
          </table:table-cell>
          <table:table-cell table:style-name="ce97" table:formula="of:=MULTIPLE.OPERATIONS([.$T$69];[.$F$10];[.$T73];[.$F$7];[.AB$69])" office:value-type="float" office:value="542310.311886858" calcext:value-type="float">
            <text:p>542,310</text:p>
          </table:table-cell>
          <table:table-cell table:style-name="ce97" table:formula="of:=MULTIPLE.OPERATIONS([.$T$69];[.$F$10];[.$T73];[.$F$7];[.AC$69])" office:value-type="float" office:value="606438.963027701" calcext:value-type="float">
            <text:p>606,439</text:p>
          </table:table-cell>
          <table:table-cell table:style-name="ce97" table:formula="of:=MULTIPLE.OPERATIONS([.$T$69];[.$F$10];[.$T73];[.$F$7];[.AD$69])" office:value-type="float" office:value="670567.614168543" calcext:value-type="float">
            <text:p>670,568</text:p>
          </table:table-cell>
          <table:table-cell table:style-name="ce97" table:formula="of:=MULTIPLE.OPERATIONS([.$T$69];[.$F$10];[.$T73];[.$F$7];[.AE$69])" office:value-type="float" office:value="734696.265309386" calcext:value-type="float">
            <text:p>734,696</text:p>
          </table:table-cell>
          <table:table-cell/>
          <table:covered-table-cell table:style-name="ce18"/>
          <table:table-cell table:style-name="ce19" table:formula="of:=+[.T40]" office:value-type="float" office:value="5.99521656197162" calcext:value-type="float">
            <text:p>6.0</text:p>
          </table:table-cell>
          <table:table-cell table:style-name="ce32" table:formula="of:=+[.U40]" office:value-type="percentage" office:value="-0.08" calcext:value-type="percentage">
            <text:p>-8.0%</text:p>
          </table:table-cell>
          <table:table-cell table:style-name="ce109" table:formula="of:=MULTIPLE.OPERATIONS([.$AI$69];[.$F$11];[.$AI73];[.$F$8];[.AJ$69])" office:value-type="float" office:value="248501.159318979" calcext:value-type="float">
            <text:p>248501.2</text:p>
          </table:table-cell>
          <table:table-cell table:style-name="ce109" table:formula="of:=MULTIPLE.OPERATIONS([.$AI$69];[.$F$11];[.$AI73];[.$F$8];[.AK$69])" office:value-type="float" office:value="264493.518205824" calcext:value-type="float">
            <text:p>264493.5</text:p>
          </table:table-cell>
          <table:table-cell table:style-name="ce109" table:formula="of:=MULTIPLE.OPERATIONS([.$AI$69];[.$F$11];[.$AI73];[.$F$8];[.AL$69])" office:value-type="float" office:value="280485.877092668" calcext:value-type="float">
            <text:p>280485.9</text:p>
          </table:table-cell>
          <table:table-cell table:style-name="ce109" table:formula="of:=MULTIPLE.OPERATIONS([.$AI$69];[.$F$11];[.$AI73];[.$F$8];[.AM$69])" office:value-type="float" office:value="308121.118361666" calcext:value-type="float">
            <text:p>308121.1</text:p>
          </table:table-cell>
          <table:table-cell table:style-name="ce109" table:formula="of:=MULTIPLE.OPERATIONS([.$AI$69];[.$F$11];[.$AI73];[.$F$8];[.AN$69])" office:value-type="float" office:value="324113.477248511" calcext:value-type="float">
            <text:p>324113.5</text:p>
          </table:table-cell>
          <table:table-cell table:style-name="ce109" table:formula="of:=MULTIPLE.OPERATIONS([.$AI$69];[.$F$11];[.$AI73];[.$F$8];[.AO$69])" office:value-type="float" office:value="340105.836135356" calcext:value-type="float">
            <text:p>340105.8</text:p>
          </table:table-cell>
          <table:table-cell table:style-name="ce109" table:formula="of:=MULTIPLE.OPERATIONS([.$AI$69];[.$F$11];[.$AI73];[.$F$8];[.AP$69])" office:value-type="float" office:value="356098.195022201" calcext:value-type="float">
            <text:p>356098.2</text:p>
          </table:table-cell>
          <table:table-cell table:style-name="ce109" table:formula="of:=MULTIPLE.OPERATIONS([.$AI$69];[.$F$11];[.$AI73];[.$F$8];[.AQ$69])" office:value-type="float" office:value="372090.553909046" calcext:value-type="float">
            <text:p>372090.6</text:p>
          </table:table-cell>
          <table:table-cell table:style-name="ce109" table:formula="of:=MULTIPLE.OPERATIONS([.$AI$69];[.$F$11];[.$AI73];[.$F$8];[.AR$69])" office:value-type="float" office:value="388082.91279589" calcext:value-type="float">
            <text:p>388082.9</text:p>
          </table:table-cell>
          <table:table-cell table:style-name="ce109" table:formula="of:=MULTIPLE.OPERATIONS([.$AI$69];[.$F$11];[.$AI73];[.$F$8];[.AS$69])" office:value-type="float" office:value="404075.271682735" calcext:value-type="float">
            <text:p>404075.3</text:p>
          </table:table-cell>
          <table:table-cell table:style-name="ce109" table:formula="of:=MULTIPLE.OPERATIONS([.$AI$69];[.$F$11];[.$AI73];[.$F$8];[.AT$69])" office:value-type="float" office:value="463499.664810987" calcext:value-type="float">
            <text:p>463499.7</text:p>
          </table:table-cell>
          <table:table-cell table:number-columns-repeated="16338"/>
        </table:table-row>
        <table:table-row table:style-name="ro4">
          <table:table-cell/>
          <table:covered-table-cell table:style-name="ce18"/>
          <table:table-cell table:style-name="ce19" table:formula="of:=+[.D41]" office:value-type="float" office:value="7.73654237288136" calcext:value-type="float">
            <text:p>7.7</text:p>
          </table:table-cell>
          <table:table-cell table:style-name="ce32" table:formula="of:=+[.E41]" office:value-type="percentage" office:value="-0.04" calcext:value-type="percentage">
            <text:p>-4.0%</text:p>
          </table:table-cell>
          <table:table-cell table:style-name="ce39" table:formula="of:=MULTIPLE.OPERATIONS([.$D$69];[.$F$9];[.$D74];[.$F$6];[.E$69])" office:value-type="float" office:value="-17153.220900913" calcext:value-type="float">
            <text:p>-17,153</text:p>
          </table:table-cell>
          <table:table-cell table:style-name="ce39" table:formula="of:=MULTIPLE.OPERATIONS([.$D$69];[.$F$9];[.$D74];[.$F$6];[.F$69])" office:value-type="float" office:value="63329.2512465281" calcext:value-type="float">
            <text:p>63,329</text:p>
          </table:table-cell>
          <table:table-cell table:style-name="ce39" table:formula="of:=MULTIPLE.OPERATIONS([.$D$69];[.$F$9];[.$D74];[.$F$6];[.G$69])" office:value-type="float" office:value="143811.72339397" calcext:value-type="float">
            <text:p>143,812</text:p>
          </table:table-cell>
          <table:table-cell table:style-name="ce39" table:formula="of:=MULTIPLE.OPERATIONS([.$D$69];[.$F$9];[.$D74];[.$F$6];[.H$69])" office:value-type="float" office:value="216050.047956258" calcext:value-type="float">
            <text:p>216,050</text:p>
          </table:table-cell>
          <table:table-cell table:style-name="ce39" table:formula="of:=MULTIPLE.OPERATIONS([.$D$69];[.$F$9];[.$D74];[.$F$6];[.I$69])" office:value-type="float" office:value="296532.520103699" calcext:value-type="float">
            <text:p>296,533</text:p>
          </table:table-cell>
          <table:table-cell table:style-name="ce39" table:formula="of:=MULTIPLE.OPERATIONS([.$D$69];[.$F$9];[.$D74];[.$F$6];[.J$69])" office:value-type="float" office:value="377014.99225114" calcext:value-type="float">
            <text:p>377,015</text:p>
          </table:table-cell>
          <table:table-cell table:style-name="ce39" table:formula="of:=MULTIPLE.OPERATIONS([.$D$69];[.$F$9];[.$D74];[.$F$6];[.K$69])" office:value-type="float" office:value="457497.464398581" calcext:value-type="float">
            <text:p>457,497</text:p>
          </table:table-cell>
          <table:table-cell table:style-name="ce39" table:formula="of:=MULTIPLE.OPERATIONS([.$D$69];[.$F$9];[.$D74];[.$F$6];[.L$69])" office:value-type="float" office:value="537979.936546022" calcext:value-type="float">
            <text:p>537,980</text:p>
          </table:table-cell>
          <table:table-cell table:style-name="ce39" table:formula="of:=MULTIPLE.OPERATIONS([.$D$69];[.$F$9];[.$D74];[.$F$6];[.M$69])" office:value-type="float" office:value="618462.408693463" calcext:value-type="float">
            <text:p>618,462</text:p>
          </table:table-cell>
          <table:table-cell table:style-name="ce39" table:formula="of:=MULTIPLE.OPERATIONS([.$D$69];[.$F$9];[.$D74];[.$F$6];[.N$69])" office:value-type="float" office:value="698944.880840904" calcext:value-type="float">
            <text:p>698,945</text:p>
          </table:table-cell>
          <table:table-cell table:style-name="ce39" table:formula="of:=MULTIPLE.OPERATIONS([.$D$69];[.$F$9];[.$D74];[.$F$6];[.O$69])" office:value-type="float" office:value="779427.352988345" calcext:value-type="float">
            <text:p>779,427</text:p>
          </table:table-cell>
          <table:table-cell table:number-columns-repeated="2"/>
          <table:covered-table-cell table:style-name="ce18"/>
          <table:table-cell table:style-name="ce19" table:formula="of:=+[.T41]" office:value-type="float" office:value="6.25587815162256" calcext:value-type="float">
            <text:p>6.3</text:p>
          </table:table-cell>
          <table:table-cell table:style-name="ce32" table:formula="of:=+[.L41]" office:value-type="percentage" office:value="-0.04" calcext:value-type="percentage">
            <text:p>-4.0%</text:p>
          </table:table-cell>
          <table:table-cell table:style-name="ce97" table:formula="of:=MULTIPLE.OPERATIONS([.$T$69];[.$F$10];[.$T74];[.$F$7];[.U$69])" office:value-type="float" office:value="3520.49237473437" calcext:value-type="float">
            <text:p>3,520</text:p>
          </table:table-cell>
          <table:table-cell table:style-name="ce97" table:formula="of:=MULTIPLE.OPERATIONS([.$T$69];[.$F$10];[.$T74];[.$F$7];[.V$69])" office:value-type="float" office:value="67649.1435155774" calcext:value-type="float">
            <text:p>67,649</text:p>
          </table:table-cell>
          <table:table-cell table:style-name="ce97" table:formula="of:=MULTIPLE.OPERATIONS([.$T$69];[.$F$10];[.$T74];[.$F$7];[.W$69])" office:value-type="float" office:value="131777.79465642" calcext:value-type="float">
            <text:p>131,778</text:p>
          </table:table-cell>
          <table:table-cell table:style-name="ce97" table:formula="of:=MULTIPLE.OPERATIONS([.$T$69];[.$F$10];[.$T74];[.$F$7];[.X$69])" office:value-type="float" office:value="237171.983789978" calcext:value-type="float">
            <text:p>237,172</text:p>
          </table:table-cell>
          <table:table-cell table:style-name="ce97" table:formula="of:=MULTIPLE.OPERATIONS([.$T$69];[.$F$10];[.$T74];[.$F$7];[.Y$69])" office:value-type="float" office:value="301300.63493082" calcext:value-type="float">
            <text:p>301,301</text:p>
          </table:table-cell>
          <table:table-cell table:style-name="ce97" table:formula="of:=MULTIPLE.OPERATIONS([.$T$69];[.$F$10];[.$T74];[.$F$7];[.Z$69])" office:value-type="float" office:value="365429.286071663" calcext:value-type="float">
            <text:p>365,429</text:p>
          </table:table-cell>
          <table:table-cell table:style-name="ce97" table:formula="of:=MULTIPLE.OPERATIONS([.$T$69];[.$F$10];[.$T74];[.$F$7];[.AA$69])" office:value-type="float" office:value="429557.937212506" calcext:value-type="float">
            <text:p>429,558</text:p>
          </table:table-cell>
          <table:table-cell table:style-name="ce97" table:formula="of:=MULTIPLE.OPERATIONS([.$T$69];[.$F$10];[.$T74];[.$F$7];[.AB$69])" office:value-type="float" office:value="493686.588353348" calcext:value-type="float">
            <text:p>493,687</text:p>
          </table:table-cell>
          <table:table-cell table:style-name="ce97" table:formula="of:=MULTIPLE.OPERATIONS([.$T$69];[.$F$10];[.$T74];[.$F$7];[.AC$69])" office:value-type="float" office:value="557815.239494191" calcext:value-type="float">
            <text:p>557,815</text:p>
          </table:table-cell>
          <table:table-cell table:style-name="ce97" table:formula="of:=MULTIPLE.OPERATIONS([.$T$69];[.$F$10];[.$T74];[.$F$7];[.AD$69])" office:value-type="float" office:value="621943.890635034" calcext:value-type="float">
            <text:p>621,944</text:p>
          </table:table-cell>
          <table:table-cell table:style-name="ce97" table:formula="of:=MULTIPLE.OPERATIONS([.$T$69];[.$F$10];[.$T74];[.$F$7];[.AE$69])" office:value-type="float" office:value="686072.541775876" calcext:value-type="float">
            <text:p>686,073</text:p>
          </table:table-cell>
          <table:table-cell/>
          <table:covered-table-cell table:style-name="ce18"/>
          <table:table-cell table:style-name="ce19" table:formula="of:=+[.T41]" office:value-type="float" office:value="6.25587815162256" calcext:value-type="float">
            <text:p>6.3</text:p>
          </table:table-cell>
          <table:table-cell table:style-name="ce32" table:formula="of:=+[.U41]" office:value-type="percentage" office:value="-0.04" calcext:value-type="percentage">
            <text:p>-4.0%</text:p>
          </table:table-cell>
          <table:table-cell table:style-name="ce109" table:formula="of:=MULTIPLE.OPERATIONS([.$AI$69];[.$F$11];[.$AI74];[.$F$8];[.AJ$69])" office:value-type="float" office:value="236851.022520378" calcext:value-type="float">
            <text:p>236851.0</text:p>
          </table:table-cell>
          <table:table-cell table:style-name="ce109" table:formula="of:=MULTIPLE.OPERATIONS([.$AI$69];[.$F$11];[.$AI74];[.$F$8];[.AK$69])" office:value-type="float" office:value="252843.381407222" calcext:value-type="float">
            <text:p>252843.4</text:p>
          </table:table-cell>
          <table:table-cell table:style-name="ce109" table:formula="of:=MULTIPLE.OPERATIONS([.$AI$69];[.$F$11];[.$AI74];[.$F$8];[.AL$69])" office:value-type="float" office:value="268835.740294067" calcext:value-type="float">
            <text:p>268835.7</text:p>
          </table:table-cell>
          <table:table-cell table:style-name="ce109" table:formula="of:=MULTIPLE.OPERATIONS([.$AI$69];[.$F$11];[.$AI74];[.$F$8];[.AM$69])" office:value-type="float" office:value="296470.981563065" calcext:value-type="float">
            <text:p>296471.0</text:p>
          </table:table-cell>
          <table:table-cell table:style-name="ce109" table:formula="of:=MULTIPLE.OPERATIONS([.$AI$69];[.$F$11];[.$AI74];[.$F$8];[.AN$69])" office:value-type="float" office:value="312463.34044991" calcext:value-type="float">
            <text:p>312463.3</text:p>
          </table:table-cell>
          <table:table-cell table:style-name="ce109" table:formula="of:=MULTIPLE.OPERATIONS([.$AI$69];[.$F$11];[.$AI74];[.$F$8];[.AO$69])" office:value-type="float" office:value="328455.699336754" calcext:value-type="float">
            <text:p>328455.7</text:p>
          </table:table-cell>
          <table:table-cell table:style-name="ce109" table:formula="of:=MULTIPLE.OPERATIONS([.$AI$69];[.$F$11];[.$AI74];[.$F$8];[.AP$69])" office:value-type="float" office:value="344448.058223599" calcext:value-type="float">
            <text:p>344448.1</text:p>
          </table:table-cell>
          <table:table-cell table:style-name="ce109" table:formula="of:=MULTIPLE.OPERATIONS([.$AI$69];[.$F$11];[.$AI74];[.$F$8];[.AQ$69])" office:value-type="float" office:value="360440.417110444" calcext:value-type="float">
            <text:p>360440.4</text:p>
          </table:table-cell>
          <table:table-cell table:style-name="ce109" table:formula="of:=MULTIPLE.OPERATIONS([.$AI$69];[.$F$11];[.$AI74];[.$F$8];[.AR$69])" office:value-type="float" office:value="376432.775997289" calcext:value-type="float">
            <text:p>376432.8</text:p>
          </table:table-cell>
          <table:table-cell table:style-name="ce109" table:formula="of:=MULTIPLE.OPERATIONS([.$AI$69];[.$F$11];[.$AI74];[.$F$8];[.AS$69])" office:value-type="float" office:value="392425.134884133" calcext:value-type="float">
            <text:p>392425.1</text:p>
          </table:table-cell>
          <table:table-cell table:style-name="ce109" table:formula="of:=MULTIPLE.OPERATIONS([.$AI$69];[.$F$11];[.$AI74];[.$F$8];[.AT$69])" office:value-type="float" office:value="408417.493770978" calcext:value-type="float">
            <text:p>408417.5</text:p>
          </table:table-cell>
          <table:table-cell table:number-columns-repeated="16338"/>
        </table:table-row>
        <table:table-row table:style-name="ro1">
          <table:table-cell/>
          <table:covered-table-cell table:style-name="ce18"/>
          <table:table-cell table:style-name="ce19" table:formula="of:=+[.D42]" office:value-type="float" office:value="8.05889830508475" calcext:value-type="float">
            <text:p>8.1</text:p>
          </table:table-cell>
          <table:table-cell table:style-name="ce32" table:formula="of:=+[.E42]" office:value-type="percentage" office:value="0" calcext:value-type="percentage">
            <text:p>0.0%</text:p>
          </table:table-cell>
          <table:table-cell table:style-name="ce39" table:formula="of:=MULTIPLE.OPERATIONS([.$D$69];[.$F$9];[.$D75];[.$F$6];[.E$69])" office:value-type="float" office:value="69331.451658934" calcext:value-type="float">
            <text:p>69,331</text:p>
          </table:table-cell>
          <table:table-cell table:style-name="ce39" table:formula="of:=MULTIPLE.OPERATIONS([.$D$69];[.$F$9];[.$D75];[.$F$6];[.F$69])" office:value-type="float" office:value="149813.923806375" calcext:value-type="float">
            <text:p>149,814</text:p>
          </table:table-cell>
          <table:table-cell table:style-name="ce39" table:formula="of:=MULTIPLE.OPERATIONS([.$D$69];[.$F$9];[.$D75];[.$F$6];[.G$69])" office:value-type="float" office:value="230296.395953816" calcext:value-type="float">
            <text:p>230,296</text:p>
          </table:table-cell>
          <table:table-cell table:style-name="ce39" table:formula="of:=MULTIPLE.OPERATIONS([.$D$69];[.$F$9];[.$D75];[.$F$6];[.H$69])" office:value-type="float" office:value="302534.720516105" calcext:value-type="float">
            <text:p>302,535</text:p>
          </table:table-cell>
          <table:table-cell table:style-name="ce39" table:formula="of:=MULTIPLE.OPERATIONS([.$D$69];[.$F$9];[.$D75];[.$F$6];[.I$69])" office:value-type="float" office:value="383017.192663546" calcext:value-type="float">
            <text:p>383,017</text:p>
          </table:table-cell>
          <table:table-cell table:style-name="ce39" table:formula="of:=MULTIPLE.OPERATIONS([.$D$69];[.$F$9];[.$D75];[.$F$6];[.J$69])" office:value-type="float" office:value="463499.664810987" calcext:value-type="float">
            <text:p>463,500</text:p>
          </table:table-cell>
          <table:table-cell table:style-name="ce39" table:formula="of:=MULTIPLE.OPERATIONS([.$D$69];[.$F$9];[.$D75];[.$F$6];[.K$69])" office:value-type="float" office:value="543982.136958429" calcext:value-type="float">
            <text:p>543,982</text:p>
          </table:table-cell>
          <table:table-cell table:style-name="ce39" table:formula="of:=MULTIPLE.OPERATIONS([.$D$69];[.$F$9];[.$D75];[.$F$6];[.L$69])" office:value-type="float" office:value="624464.609105869" calcext:value-type="float">
            <text:p>624,465</text:p>
          </table:table-cell>
          <table:table-cell table:style-name="ce39" table:formula="of:=MULTIPLE.OPERATIONS([.$D$69];[.$F$9];[.$D75];[.$F$6];[.M$69])" office:value-type="float" office:value="704947.081253311" calcext:value-type="float">
            <text:p>704,947</text:p>
          </table:table-cell>
          <table:table-cell table:style-name="ce39" table:formula="of:=MULTIPLE.OPERATIONS([.$D$69];[.$F$9];[.$D75];[.$F$6];[.N$69])" office:value-type="float" office:value="785429.553400751" calcext:value-type="float">
            <text:p>785,430</text:p>
          </table:table-cell>
          <table:table-cell table:style-name="ce39" table:formula="of:=MULTIPLE.OPERATIONS([.$D$69];[.$F$9];[.$D75];[.$F$6];[.O$69])" office:value-type="float" office:value="865912.025548192" calcext:value-type="float">
            <text:p>865,912</text:p>
          </table:table-cell>
          <table:table-cell table:number-columns-repeated="2"/>
          <table:covered-table-cell table:style-name="ce18"/>
          <table:table-cell table:style-name="ce19" table:formula="of:=+[.K42]" office:value-type="float" office:value="8.19576271186441" calcext:value-type="float">
            <text:p>8.2</text:p>
          </table:table-cell>
          <table:table-cell table:style-name="ce32" table:formula="of:=+[.L42]" office:value-type="percentage" office:value="0" calcext:value-type="percentage">
            <text:p>0.0%</text:p>
          </table:table-cell>
          <table:table-cell table:style-name="ce97" table:formula="of:=MULTIPLE.OPERATIONS([.$T$69];[.$F$10];[.$T75];[.$F$7];[.U$69])" office:value-type="float" office:value="101590.871114059" calcext:value-type="float">
            <text:p>101,591</text:p>
          </table:table-cell>
          <table:table-cell table:style-name="ce97" table:formula="of:=MULTIPLE.OPERATIONS([.$T$69];[.$F$10];[.$T75];[.$F$7];[.V$69])" office:value-type="float" office:value="19025.4199820675" calcext:value-type="float">
            <text:p>19,025</text:p>
          </table:table-cell>
          <table:table-cell table:style-name="ce97" table:formula="of:=MULTIPLE.OPERATIONS([.$T$69];[.$F$10];[.$T75];[.$F$7];[.W$69])" office:value-type="float" office:value="83154.0711229098" calcext:value-type="float">
            <text:p>83,154</text:p>
          </table:table-cell>
          <table:table-cell table:style-name="ce97" table:formula="of:=MULTIPLE.OPERATIONS([.$T$69];[.$F$10];[.$T75];[.$F$7];[.X$69])" office:value-type="float" office:value="188548.260256468" calcext:value-type="float">
            <text:p>188,548</text:p>
          </table:table-cell>
          <table:table-cell table:style-name="ce97" table:formula="of:=MULTIPLE.OPERATIONS([.$T$69];[.$F$10];[.$T75];[.$F$7];[.Y$69])" office:value-type="float" office:value="252676.91139731" calcext:value-type="float">
            <text:p>252,677</text:p>
          </table:table-cell>
          <table:table-cell table:style-name="ce97" table:formula="of:=MULTIPLE.OPERATIONS([.$T$69];[.$F$10];[.$T75];[.$F$7];[.Z$69])" office:value-type="float" office:value="316805.562538153" calcext:value-type="float">
            <text:p>316,806</text:p>
          </table:table-cell>
          <table:table-cell table:style-name="ce97" table:formula="of:=MULTIPLE.OPERATIONS([.$T$69];[.$F$10];[.$T75];[.$F$7];[.AA$69])" office:value-type="float" office:value="380934.213678996" calcext:value-type="float">
            <text:p>380,934</text:p>
          </table:table-cell>
          <table:table-cell table:style-name="ce97" table:formula="of:=MULTIPLE.OPERATIONS([.$T$69];[.$F$10];[.$T75];[.$F$7];[.AB$69])" office:value-type="float" office:value="445062.864819838" calcext:value-type="float">
            <text:p>445,063</text:p>
          </table:table-cell>
          <table:table-cell table:style-name="ce97" table:formula="of:=MULTIPLE.OPERATIONS([.$T$69];[.$F$10];[.$T75];[.$F$7];[.AC$69])" office:value-type="float" office:value="509191.515960681" calcext:value-type="float">
            <text:p>509,192</text:p>
          </table:table-cell>
          <table:table-cell table:style-name="ce97" table:formula="of:=MULTIPLE.OPERATIONS([.$T$69];[.$F$10];[.$T75];[.$F$7];[.AD$69])" office:value-type="float" office:value="573320.167101524" calcext:value-type="float">
            <text:p>573,320</text:p>
          </table:table-cell>
          <table:table-cell table:style-name="ce97" table:formula="of:=MULTIPLE.OPERATIONS([.$T$69];[.$F$10];[.$T75];[.$F$7];[.AE$69])" office:value-type="float" office:value="637448.818242366" calcext:value-type="float">
            <text:p>637,449</text:p>
          </table:table-cell>
          <table:table-cell/>
          <table:covered-table-cell table:style-name="ce18"/>
          <table:table-cell table:style-name="ce19" table:formula="of:=+[.T42]" office:value-type="float" office:value="6.5165397412735" calcext:value-type="float">
            <text:p>6.5</text:p>
          </table:table-cell>
          <table:table-cell table:style-name="ce32" table:formula="of:=+[.U42]" office:value-type="percentage" office:value="0" calcext:value-type="percentage">
            <text:p>0.0%</text:p>
          </table:table-cell>
          <table:table-cell table:style-name="ce109" table:formula="of:=MULTIPLE.OPERATIONS([.$AI$69];[.$F$11];[.$AI75];[.$F$8];[.AJ$69])" office:value-type="float" office:value="225200.885721776" calcext:value-type="float">
            <text:p>225200.9</text:p>
          </table:table-cell>
          <table:table-cell table:style-name="ce109" table:formula="of:=MULTIPLE.OPERATIONS([.$AI$69];[.$F$11];[.$AI75];[.$F$8];[.AK$69])" office:value-type="float" office:value="241193.244608621" calcext:value-type="float">
            <text:p>241193.2</text:p>
          </table:table-cell>
          <table:table-cell table:style-name="ce109" table:formula="of:=MULTIPLE.OPERATIONS([.$AI$69];[.$F$11];[.$AI75];[.$F$8];[.AL$69])" office:value-type="float" office:value="257185.603495465" calcext:value-type="float">
            <text:p>257185.6</text:p>
          </table:table-cell>
          <table:table-cell table:style-name="ce109" table:formula="of:=MULTIPLE.OPERATIONS([.$AI$69];[.$F$11];[.$AI75];[.$F$8];[.AM$69])" office:value-type="float" office:value="284820.844764464" calcext:value-type="float">
            <text:p>284820.8</text:p>
          </table:table-cell>
          <table:table-cell table:style-name="ce109" table:formula="of:=MULTIPLE.OPERATIONS([.$AI$69];[.$F$11];[.$AI75];[.$F$8];[.AN$69])" office:value-type="float" office:value="300813.203651308" calcext:value-type="float">
            <text:p>300813.2</text:p>
          </table:table-cell>
          <table:table-cell table:style-name="ce109" table:formula="of:=MULTIPLE.OPERATIONS([.$AI$69];[.$F$11];[.$AI75];[.$F$8];[.AO$69])" office:value-type="float" office:value="316805.562538153" calcext:value-type="float">
            <text:p>316805.6</text:p>
          </table:table-cell>
          <table:table-cell table:style-name="ce109" table:formula="of:=MULTIPLE.OPERATIONS([.$AI$69];[.$F$11];[.$AI75];[.$F$8];[.AP$69])" office:value-type="float" office:value="332797.921424998" calcext:value-type="float">
            <text:p>332797.9</text:p>
          </table:table-cell>
          <table:table-cell table:style-name="ce109" table:formula="of:=MULTIPLE.OPERATIONS([.$AI$69];[.$F$11];[.$AI75];[.$F$8];[.AQ$69])" office:value-type="float" office:value="348790.280311843" calcext:value-type="float">
            <text:p>348790.3</text:p>
          </table:table-cell>
          <table:table-cell table:style-name="ce109" table:formula="of:=MULTIPLE.OPERATIONS([.$AI$69];[.$F$11];[.$AI75];[.$F$8];[.AR$69])" office:value-type="float" office:value="364782.639198687" calcext:value-type="float">
            <text:p>364782.6</text:p>
          </table:table-cell>
          <table:table-cell table:style-name="ce109" table:formula="of:=MULTIPLE.OPERATIONS([.$AI$69];[.$F$11];[.$AI75];[.$F$8];[.AS$69])" office:value-type="float" office:value="380774.998085532" calcext:value-type="float">
            <text:p>380775.0</text:p>
          </table:table-cell>
          <table:table-cell table:style-name="ce109" table:formula="of:=MULTIPLE.OPERATIONS([.$AI$69];[.$F$11];[.$AI75];[.$F$8];[.AT$69])" office:value-type="float" office:value="463499.664810987" calcext:value-type="float">
            <text:p>463499.7</text:p>
          </table:table-cell>
          <table:table-cell table:number-columns-repeated="16338"/>
        </table:table-row>
        <table:table-row table:style-name="ro1">
          <table:table-cell/>
          <table:covered-table-cell table:style-name="ce18"/>
          <table:table-cell table:style-name="ce19" table:formula="of:=+[.D43]" office:value-type="float" office:value="8.38125423728814" calcext:value-type="float">
            <text:p>8.4</text:p>
          </table:table-cell>
          <table:table-cell table:style-name="ce32" table:formula="of:=+[.E43]" office:value-type="percentage" office:value="0.04" calcext:value-type="percentage">
            <text:p>4.0%</text:p>
          </table:table-cell>
          <table:table-cell table:style-name="ce39" table:formula="of:=MULTIPLE.OPERATIONS([.$D$69];[.$F$9];[.$D76];[.$F$6];[.E$69])" office:value-type="float" office:value="9122.02194594708" calcext:value-type="float">
            <text:p>9,122</text:p>
          </table:table-cell>
          <table:table-cell table:style-name="ce39" table:formula="of:=MULTIPLE.OPERATIONS([.$D$69];[.$F$9];[.$D76];[.$F$6];[.F$69])" office:value-type="float" office:value="89604.4940933883" calcext:value-type="float">
            <text:p>89,604</text:p>
          </table:table-cell>
          <table:table-cell table:style-name="ce39" table:formula="of:=MULTIPLE.OPERATIONS([.$D$69];[.$F$9];[.$D76];[.$F$6];[.G$69])" office:value-type="float" office:value="170086.96624083" calcext:value-type="float">
            <text:p>170,087</text:p>
          </table:table-cell>
          <table:table-cell table:style-name="ce39" table:formula="of:=MULTIPLE.OPERATIONS([.$D$69];[.$F$9];[.$D76];[.$F$6];[.H$69])" office:value-type="float" office:value="242325.290803118" calcext:value-type="float">
            <text:p>242,325</text:p>
          </table:table-cell>
          <table:table-cell table:style-name="ce39" table:formula="of:=MULTIPLE.OPERATIONS([.$D$69];[.$F$9];[.$D76];[.$F$6];[.I$69])" office:value-type="float" office:value="322807.762950559" calcext:value-type="float">
            <text:p>322,808</text:p>
          </table:table-cell>
          <table:table-cell table:style-name="ce39" table:formula="of:=MULTIPLE.OPERATIONS([.$D$69];[.$F$9];[.$D76];[.$F$6];[.J$69])" office:value-type="float" office:value="403290.235098" calcext:value-type="float">
            <text:p>403,290</text:p>
          </table:table-cell>
          <table:table-cell table:style-name="ce39" table:formula="of:=MULTIPLE.OPERATIONS([.$D$69];[.$F$9];[.$D76];[.$F$6];[.K$69])" office:value-type="float" office:value="483772.707245442" calcext:value-type="float">
            <text:p>483,773</text:p>
          </table:table-cell>
          <table:table-cell table:style-name="ce39" table:formula="of:=MULTIPLE.OPERATIONS([.$D$69];[.$F$9];[.$D76];[.$F$6];[.L$69])" office:value-type="float" office:value="564255.179392882" calcext:value-type="float">
            <text:p>564,255</text:p>
          </table:table-cell>
          <table:table-cell table:style-name="ce39" table:formula="of:=MULTIPLE.OPERATIONS([.$D$69];[.$F$9];[.$D76];[.$F$6];[.M$69])" office:value-type="float" office:value="644737.651540323" calcext:value-type="float">
            <text:p>644,738</text:p>
          </table:table-cell>
          <table:table-cell table:style-name="ce39" table:formula="of:=MULTIPLE.OPERATIONS([.$D$69];[.$F$9];[.$D76];[.$F$6];[.N$69])" office:value-type="float" office:value="725220.123687764" calcext:value-type="float">
            <text:p>725,220</text:p>
          </table:table-cell>
          <table:table-cell table:style-name="ce39" table:formula="of:=MULTIPLE.OPERATIONS([.$D$69];[.$F$9];[.$D76];[.$F$6];[.O$69])" office:value-type="float" office:value="805702.595835205" calcext:value-type="float">
            <text:p>805,703</text:p>
          </table:table-cell>
          <table:table-cell table:number-columns-repeated="2"/>
          <table:covered-table-cell table:style-name="ce18"/>
          <table:table-cell table:style-name="ce19" table:formula="of:=+[.T43]" office:value-type="float" office:value="6.77720133092444" calcext:value-type="float">
            <text:p>6.8</text:p>
          </table:table-cell>
          <table:table-cell table:style-name="ce32" table:formula="of:=+[.L43]" office:value-type="percentage" office:value="0.04" calcext:value-type="percentage">
            <text:p>4.0%</text:p>
          </table:table-cell>
          <table:table-cell table:style-name="ce97" table:formula="of:=MULTIPLE.OPERATIONS([.$T$69];[.$F$10];[.$T76];[.$F$7];[.U$69])" office:value-type="float" office:value="52967.1475805487" calcext:value-type="float">
            <text:p>52,967</text:p>
          </table:table-cell>
          <table:table-cell table:style-name="ce97" table:formula="of:=MULTIPLE.OPERATIONS([.$T$69];[.$F$10];[.$T76];[.$F$7];[.V$69])" office:value-type="float" office:value="-29598.3035514425" calcext:value-type="float">
            <text:p>-29,598</text:p>
          </table:table-cell>
          <table:table-cell table:style-name="ce97" table:formula="of:=MULTIPLE.OPERATIONS([.$T$69];[.$F$10];[.$T76];[.$F$7];[.W$69])" office:value-type="float" office:value="34530.3475893999" calcext:value-type="float">
            <text:p>34,530</text:p>
          </table:table-cell>
          <table:table-cell table:style-name="ce97" table:formula="of:=MULTIPLE.OPERATIONS([.$T$69];[.$F$10];[.$T76];[.$F$7];[.X$69])" office:value-type="float" office:value="139924.536722958" calcext:value-type="float">
            <text:p>139,925</text:p>
          </table:table-cell>
          <table:table-cell table:style-name="ce97" table:formula="of:=MULTIPLE.OPERATIONS([.$T$69];[.$F$10];[.$T76];[.$F$7];[.Y$69])" office:value-type="float" office:value="204053.1878638" calcext:value-type="float">
            <text:p>204,053</text:p>
          </table:table-cell>
          <table:table-cell table:style-name="ce97" table:formula="of:=MULTIPLE.OPERATIONS([.$T$69];[.$F$10];[.$T76];[.$F$7];[.Z$69])" office:value-type="float" office:value="268181.839004643" calcext:value-type="float">
            <text:p>268,182</text:p>
          </table:table-cell>
          <table:table-cell table:style-name="ce97" table:formula="of:=MULTIPLE.OPERATIONS([.$T$69];[.$F$10];[.$T76];[.$F$7];[.AA$69])" office:value-type="float" office:value="332310.490145486" calcext:value-type="float">
            <text:p>332,310</text:p>
          </table:table-cell>
          <table:table-cell table:style-name="ce97" table:formula="of:=MULTIPLE.OPERATIONS([.$T$69];[.$F$10];[.$T76];[.$F$7];[.AB$69])" office:value-type="float" office:value="396439.141286328" calcext:value-type="float">
            <text:p>396,439</text:p>
          </table:table-cell>
          <table:table-cell table:style-name="ce97" table:formula="of:=MULTIPLE.OPERATIONS([.$T$69];[.$F$10];[.$T76];[.$F$7];[.AC$69])" office:value-type="float" office:value="460567.792427171" calcext:value-type="float">
            <text:p>460,568</text:p>
          </table:table-cell>
          <table:table-cell table:style-name="ce97" table:formula="of:=MULTIPLE.OPERATIONS([.$T$69];[.$F$10];[.$T76];[.$F$7];[.AD$69])" office:value-type="float" office:value="524696.443568014" calcext:value-type="float">
            <text:p>524,696</text:p>
          </table:table-cell>
          <table:table-cell table:style-name="ce97" table:formula="of:=MULTIPLE.OPERATIONS([.$T$69];[.$F$10];[.$T76];[.$F$7];[.AE$69])" office:value-type="float" office:value="588825.094708856" calcext:value-type="float">
            <text:p>588,825</text:p>
          </table:table-cell>
          <table:table-cell/>
          <table:covered-table-cell table:style-name="ce18"/>
          <table:table-cell table:style-name="ce19" table:formula="of:=+[.T43]" office:value-type="float" office:value="6.77720133092444" calcext:value-type="float">
            <text:p>6.8</text:p>
          </table:table-cell>
          <table:table-cell table:style-name="ce32" table:formula="of:=+[.U43]" office:value-type="percentage" office:value="0.04" calcext:value-type="percentage">
            <text:p>4.0%</text:p>
          </table:table-cell>
          <table:table-cell table:style-name="ce109" table:formula="of:=MULTIPLE.OPERATIONS([.$AI$69];[.$F$11];[.$AI76];[.$F$8];[.AJ$69])" office:value-type="float" office:value="213550.748923175" calcext:value-type="float">
            <text:p>213550.7</text:p>
          </table:table-cell>
          <table:table-cell table:style-name="ce109" table:formula="of:=MULTIPLE.OPERATIONS([.$AI$69];[.$F$11];[.$AI76];[.$F$8];[.AK$69])" office:value-type="float" office:value="229543.10781002" calcext:value-type="float">
            <text:p>229543.1</text:p>
          </table:table-cell>
          <table:table-cell table:style-name="ce109" table:formula="of:=MULTIPLE.OPERATIONS([.$AI$69];[.$F$11];[.$AI76];[.$F$8];[.AL$69])" office:value-type="float" office:value="245535.466696864" calcext:value-type="float">
            <text:p>245535.5</text:p>
          </table:table-cell>
          <table:table-cell table:style-name="ce109" table:formula="of:=MULTIPLE.OPERATIONS([.$AI$69];[.$F$11];[.$AI76];[.$F$8];[.AM$69])" office:value-type="float" office:value="273170.707965862" calcext:value-type="float">
            <text:p>273170.7</text:p>
          </table:table-cell>
          <table:table-cell table:style-name="ce109" table:formula="of:=MULTIPLE.OPERATIONS([.$AI$69];[.$F$11];[.$AI76];[.$F$8];[.AN$69])" office:value-type="float" office:value="289163.066852707" calcext:value-type="float">
            <text:p>289163.1</text:p>
          </table:table-cell>
          <table:table-cell table:style-name="ce109" table:formula="of:=MULTIPLE.OPERATIONS([.$AI$69];[.$F$11];[.$AI76];[.$F$8];[.AO$69])" office:value-type="float" office:value="305155.425739552" calcext:value-type="float">
            <text:p>305155.4</text:p>
          </table:table-cell>
          <table:table-cell table:style-name="ce109" table:formula="of:=MULTIPLE.OPERATIONS([.$AI$69];[.$F$11];[.$AI76];[.$F$8];[.AP$69])" office:value-type="float" office:value="321147.784626396" calcext:value-type="float">
            <text:p>321147.8</text:p>
          </table:table-cell>
          <table:table-cell table:style-name="ce109" table:formula="of:=MULTIPLE.OPERATIONS([.$AI$69];[.$F$11];[.$AI76];[.$F$8];[.AQ$69])" office:value-type="float" office:value="337140.143513241" calcext:value-type="float">
            <text:p>337140.1</text:p>
          </table:table-cell>
          <table:table-cell table:style-name="ce109" table:formula="of:=MULTIPLE.OPERATIONS([.$AI$69];[.$F$11];[.$AI76];[.$F$8];[.AR$69])" office:value-type="float" office:value="353132.502400086" calcext:value-type="float">
            <text:p>353132.5</text:p>
          </table:table-cell>
          <table:table-cell table:style-name="ce109" table:formula="of:=MULTIPLE.OPERATIONS([.$AI$69];[.$F$11];[.$AI76];[.$F$8];[.AS$69])" office:value-type="float" office:value="369124.86128693" calcext:value-type="float">
            <text:p>369124.9</text:p>
          </table:table-cell>
          <table:table-cell table:style-name="ce109" table:formula="of:=MULTIPLE.OPERATIONS([.$AI$69];[.$F$11];[.$AI76];[.$F$8];[.AT$69])" office:value-type="float" office:value="463499.664810987" calcext:value-type="float">
            <text:p>463499.7</text:p>
          </table:table-cell>
          <table:table-cell table:number-columns-repeated="16338"/>
        </table:table-row>
        <table:table-row table:style-name="ro1">
          <table:table-cell/>
          <table:covered-table-cell table:style-name="ce18"/>
          <table:table-cell table:style-name="ce19" table:formula="of:=+[.D44]" office:value-type="float" office:value="8.70361016949153" calcext:value-type="float">
            <text:p>8.7</text:p>
          </table:table-cell>
          <table:table-cell table:style-name="ce32" table:formula="of:=+[.E44]" office:value-type="percentage" office:value="0.08" calcext:value-type="percentage">
            <text:p>8.0%</text:p>
          </table:table-cell>
          <table:table-cell table:style-name="ce39" table:formula="of:=MULTIPLE.OPERATIONS([.$D$69];[.$F$9];[.$D77];[.$F$6];[.E$69])" office:value-type="float" office:value="-51087.40776704" calcext:value-type="float">
            <text:p>-51,087</text:p>
          </table:table-cell>
          <table:table-cell table:style-name="ce39" table:formula="of:=MULTIPLE.OPERATIONS([.$D$69];[.$F$9];[.$D77];[.$F$6];[.F$69])" office:value-type="float" office:value="29395.0643804013" calcext:value-type="float">
            <text:p>29,395</text:p>
          </table:table-cell>
          <table:table-cell table:style-name="ce39" table:formula="of:=MULTIPLE.OPERATIONS([.$D$69];[.$F$9];[.$D77];[.$F$6];[.G$69])" office:value-type="float" office:value="109877.536527843" calcext:value-type="float">
            <text:p>109,878</text:p>
          </table:table-cell>
          <table:table-cell table:style-name="ce39" table:formula="of:=MULTIPLE.OPERATIONS([.$D$69];[.$F$9];[.$D77];[.$F$6];[.H$69])" office:value-type="float" office:value="182115.861090131" calcext:value-type="float">
            <text:p>182,116</text:p>
          </table:table-cell>
          <table:table-cell table:style-name="ce39" table:formula="of:=MULTIPLE.OPERATIONS([.$D$69];[.$F$9];[.$D77];[.$F$6];[.I$69])" office:value-type="float" office:value="262598.333237572" calcext:value-type="float">
            <text:p>262,598</text:p>
          </table:table-cell>
          <table:table-cell table:style-name="ce39" table:formula="of:=MULTIPLE.OPERATIONS([.$D$69];[.$F$9];[.$D77];[.$F$6];[.J$69])" office:value-type="float" office:value="343080.805385013" calcext:value-type="float">
            <text:p>343,081</text:p>
          </table:table-cell>
          <table:table-cell table:style-name="ce39" table:formula="of:=MULTIPLE.OPERATIONS([.$D$69];[.$F$9];[.$D77];[.$F$6];[.K$69])" office:value-type="float" office:value="423563.277532454" calcext:value-type="float">
            <text:p>423,563</text:p>
          </table:table-cell>
          <table:table-cell table:style-name="ce39" table:formula="of:=MULTIPLE.OPERATIONS([.$D$69];[.$F$9];[.$D77];[.$F$6];[.L$69])" office:value-type="float" office:value="504045.749679895" calcext:value-type="float">
            <text:p>504,046</text:p>
          </table:table-cell>
          <table:table-cell table:style-name="ce39" table:formula="of:=MULTIPLE.OPERATIONS([.$D$69];[.$F$9];[.$D77];[.$F$6];[.M$69])" office:value-type="float" office:value="584528.221827337" calcext:value-type="float">
            <text:p>584,528</text:p>
          </table:table-cell>
          <table:table-cell table:style-name="ce39" table:formula="of:=MULTIPLE.OPERATIONS([.$D$69];[.$F$9];[.$D77];[.$F$6];[.N$69])" office:value-type="float" office:value="665010.693974777" calcext:value-type="float">
            <text:p>665,011</text:p>
          </table:table-cell>
          <table:table-cell table:style-name="ce39" table:formula="of:=MULTIPLE.OPERATIONS([.$D$69];[.$F$9];[.$D77];[.$F$6];[.O$69])" office:value-type="float" office:value="745493.166122218" calcext:value-type="float">
            <text:p>745,493</text:p>
          </table:table-cell>
          <table:table-cell table:number-columns-repeated="2"/>
          <table:covered-table-cell table:style-name="ce18"/>
          <table:table-cell table:style-name="ce19" table:formula="of:=+[.T44]" office:value-type="float" office:value="7.03786292057538" calcext:value-type="float">
            <text:p>7.0</text:p>
          </table:table-cell>
          <table:table-cell table:style-name="ce32" table:formula="of:=+[.L44]" office:value-type="percentage" office:value="0.08" calcext:value-type="percentage">
            <text:p>8.0%</text:p>
          </table:table-cell>
          <table:table-cell table:style-name="ce97" table:formula="of:=MULTIPLE.OPERATIONS([.$T$69];[.$F$10];[.$T77];[.$F$7];[.U$69])" office:value-type="float" office:value="4343.42404703901" calcext:value-type="float">
            <text:p>4,343</text:p>
          </table:table-cell>
          <table:table-cell table:style-name="ce97" table:formula="of:=MULTIPLE.OPERATIONS([.$T$69];[.$F$10];[.$T77];[.$F$7];[.V$69])" office:value-type="float" office:value="-78222.0270849522" calcext:value-type="float">
            <text:p>-78,222</text:p>
          </table:table-cell>
          <table:table-cell table:style-name="ce97" table:formula="of:=MULTIPLE.OPERATIONS([.$T$69];[.$F$10];[.$T77];[.$F$7];[.W$69])" office:value-type="float" office:value="-14093.3759441099" calcext:value-type="float">
            <text:p>-14,093</text:p>
          </table:table-cell>
          <table:table-cell table:style-name="ce97" table:formula="of:=MULTIPLE.OPERATIONS([.$T$69];[.$F$10];[.$T77];[.$F$7];[.X$69])" office:value-type="float" office:value="91300.8131894481" calcext:value-type="float">
            <text:p>91,301</text:p>
          </table:table-cell>
          <table:table-cell table:style-name="ce97" table:formula="of:=MULTIPLE.OPERATIONS([.$T$69];[.$F$10];[.$T77];[.$F$7];[.Y$69])" office:value-type="float" office:value="155429.46433029" calcext:value-type="float">
            <text:p>155,429</text:p>
          </table:table-cell>
          <table:table-cell table:style-name="ce97" table:formula="of:=MULTIPLE.OPERATIONS([.$T$69];[.$F$10];[.$T77];[.$F$7];[.Z$69])" office:value-type="float" office:value="219558.115471133" calcext:value-type="float">
            <text:p>219,558</text:p>
          </table:table-cell>
          <table:table-cell table:style-name="ce97" table:formula="of:=MULTIPLE.OPERATIONS([.$T$69];[.$F$10];[.$T77];[.$F$7];[.AA$69])" office:value-type="float" office:value="283686.766611976" calcext:value-type="float">
            <text:p>283,687</text:p>
          </table:table-cell>
          <table:table-cell table:style-name="ce97" table:formula="of:=MULTIPLE.OPERATIONS([.$T$69];[.$F$10];[.$T77];[.$F$7];[.AB$69])" office:value-type="float" office:value="347815.417752819" calcext:value-type="float">
            <text:p>347,815</text:p>
          </table:table-cell>
          <table:table-cell table:style-name="ce97" table:formula="of:=MULTIPLE.OPERATIONS([.$T$69];[.$F$10];[.$T77];[.$F$7];[.AC$69])" office:value-type="float" office:value="411944.068893662" calcext:value-type="float">
            <text:p>411,944</text:p>
          </table:table-cell>
          <table:table-cell table:style-name="ce97" table:formula="of:=MULTIPLE.OPERATIONS([.$T$69];[.$F$10];[.$T77];[.$F$7];[.AD$69])" office:value-type="float" office:value="476072.720034504" calcext:value-type="float">
            <text:p>476,073</text:p>
          </table:table-cell>
          <table:table-cell table:style-name="ce97" table:formula="of:=MULTIPLE.OPERATIONS([.$T$69];[.$F$10];[.$T77];[.$F$7];[.AE$69])" office:value-type="float" office:value="540201.371175347" calcext:value-type="float">
            <text:p>540,201</text:p>
          </table:table-cell>
          <table:table-cell/>
          <table:covered-table-cell table:style-name="ce18"/>
          <table:table-cell table:style-name="ce19" table:formula="of:=+[.T44]" office:value-type="float" office:value="7.03786292057538" calcext:value-type="float">
            <text:p>7.0</text:p>
          </table:table-cell>
          <table:table-cell table:style-name="ce32" table:formula="of:=+[.U44]" office:value-type="percentage" office:value="0.08" calcext:value-type="percentage">
            <text:p>8.0%</text:p>
          </table:table-cell>
          <table:table-cell table:style-name="ce109" table:formula="of:=MULTIPLE.OPERATIONS([.$AI$69];[.$F$11];[.$AI77];[.$F$8];[.AJ$69])" office:value-type="float" office:value="201900.612124574" calcext:value-type="float">
            <text:p>201900.6</text:p>
          </table:table-cell>
          <table:table-cell table:style-name="ce109" table:formula="of:=MULTIPLE.OPERATIONS([.$AI$69];[.$F$11];[.$AI77];[.$F$8];[.AK$69])" office:value-type="float" office:value="217892.971011418" calcext:value-type="float">
            <text:p>217893.0</text:p>
          </table:table-cell>
          <table:table-cell table:style-name="ce109" table:formula="of:=MULTIPLE.OPERATIONS([.$AI$69];[.$F$11];[.$AI77];[.$F$8];[.AL$69])" office:value-type="float" office:value="233885.329898263" calcext:value-type="float">
            <text:p>233885.3</text:p>
          </table:table-cell>
          <table:table-cell table:style-name="ce109" table:formula="of:=MULTIPLE.OPERATIONS([.$AI$69];[.$F$11];[.$AI77];[.$F$8];[.AM$69])" office:value-type="float" office:value="261520.571167261" calcext:value-type="float">
            <text:p>261520.6</text:p>
          </table:table-cell>
          <table:table-cell table:style-name="ce109" table:formula="of:=MULTIPLE.OPERATIONS([.$AI$69];[.$F$11];[.$AI77];[.$F$8];[.AN$69])" office:value-type="float" office:value="277512.930054106" calcext:value-type="float">
            <text:p>277512.9</text:p>
          </table:table-cell>
          <table:table-cell table:style-name="ce109" table:formula="of:=MULTIPLE.OPERATIONS([.$AI$69];[.$F$11];[.$AI77];[.$F$8];[.AO$69])" office:value-type="float" office:value="293505.28894095" calcext:value-type="float">
            <text:p>293505.3</text:p>
          </table:table-cell>
          <table:table-cell table:style-name="ce109" table:formula="of:=MULTIPLE.OPERATIONS([.$AI$69];[.$F$11];[.$AI77];[.$F$8];[.AP$69])" office:value-type="float" office:value="309497.647827795" calcext:value-type="float">
            <text:p>309497.6</text:p>
          </table:table-cell>
          <table:table-cell table:style-name="ce109" table:formula="of:=MULTIPLE.OPERATIONS([.$AI$69];[.$F$11];[.$AI77];[.$F$8];[.AQ$69])" office:value-type="float" office:value="325490.00671464" calcext:value-type="float">
            <text:p>325490.0</text:p>
          </table:table-cell>
          <table:table-cell table:style-name="ce109" table:formula="of:=MULTIPLE.OPERATIONS([.$AI$69];[.$F$11];[.$AI77];[.$F$8];[.AR$69])" office:value-type="float" office:value="341482.365601484" calcext:value-type="float">
            <text:p>341482.4</text:p>
          </table:table-cell>
          <table:table-cell table:style-name="ce109" table:formula="of:=MULTIPLE.OPERATIONS([.$AI$69];[.$F$11];[.$AI77];[.$F$8];[.AS$69])" office:value-type="float" office:value="357474.724488329" calcext:value-type="float">
            <text:p>357474.7</text:p>
          </table:table-cell>
          <table:table-cell table:style-name="ce109" table:formula="of:=MULTIPLE.OPERATIONS([.$AI$69];[.$F$11];[.$AI77];[.$F$8];[.AT$69])" office:value-type="float" office:value="463499.664810987" calcext:value-type="float">
            <text:p>463499.7</text:p>
          </table:table-cell>
          <table:table-cell table:number-columns-repeated="16338"/>
        </table:table-row>
        <table:table-row table:style-name="ro1">
          <table:table-cell/>
          <table:covered-table-cell table:style-name="ce18"/>
          <table:table-cell table:style-name="ce19" table:formula="of:=+[.D45]" office:value-type="float" office:value="9.02596610169492" calcext:value-type="float">
            <text:p>9.0</text:p>
          </table:table-cell>
          <table:table-cell table:style-name="ce32" table:formula="of:=+[.E45]" office:value-type="percentage" office:value="0.12" calcext:value-type="percentage">
            <text:p>12.0%</text:p>
          </table:table-cell>
          <table:table-cell table:style-name="ce39" table:formula="of:=MULTIPLE.OPERATIONS([.$D$69];[.$F$9];[.$D78];[.$F$6];[.E$69])" office:value-type="float" office:value="-111296.837480027" calcext:value-type="float">
            <text:p>-111,297</text:p>
          </table:table-cell>
          <table:table-cell table:style-name="ce39" table:formula="of:=MULTIPLE.OPERATIONS([.$D$69];[.$F$9];[.$D78];[.$F$6];[.F$69])" office:value-type="float" office:value="-30814.3653325858" calcext:value-type="float">
            <text:p>-30,814</text:p>
          </table:table-cell>
          <table:table-cell table:style-name="ce39" table:formula="of:=MULTIPLE.OPERATIONS([.$D$69];[.$F$9];[.$D78];[.$F$6];[.G$69])" office:value-type="float" office:value="49668.1068148556" calcext:value-type="float">
            <text:p>49,668</text:p>
          </table:table-cell>
          <table:table-cell table:style-name="ce39" table:formula="of:=MULTIPLE.OPERATIONS([.$D$69];[.$F$9];[.$D78];[.$F$6];[.H$69])" office:value-type="float" office:value="121906.431377144" calcext:value-type="float">
            <text:p>121,906</text:p>
          </table:table-cell>
          <table:table-cell table:style-name="ce39" table:formula="of:=MULTIPLE.OPERATIONS([.$D$69];[.$F$9];[.$D78];[.$F$6];[.I$69])" office:value-type="float" office:value="202388.903524585" calcext:value-type="float">
            <text:p>202,389</text:p>
          </table:table-cell>
          <table:table-cell table:style-name="ce39" table:formula="of:=MULTIPLE.OPERATIONS([.$D$69];[.$F$9];[.$D78];[.$F$6];[.J$69])" office:value-type="float" office:value="282871.375672026" calcext:value-type="float">
            <text:p>282,871</text:p>
          </table:table-cell>
          <table:table-cell table:style-name="ce39" table:formula="of:=MULTIPLE.OPERATIONS([.$D$69];[.$F$9];[.$D78];[.$F$6];[.K$69])" office:value-type="float" office:value="363353.847819467" calcext:value-type="float">
            <text:p>363,354</text:p>
          </table:table-cell>
          <table:table-cell table:style-name="ce39" table:formula="of:=MULTIPLE.OPERATIONS([.$D$69];[.$F$9];[.$D78];[.$F$6];[.L$69])" office:value-type="float" office:value="443836.319966908" calcext:value-type="float">
            <text:p>443,836</text:p>
          </table:table-cell>
          <table:table-cell table:style-name="ce39" table:formula="of:=MULTIPLE.OPERATIONS([.$D$69];[.$F$9];[.$D78];[.$F$6];[.M$69])" office:value-type="float" office:value="524318.792114349" calcext:value-type="float">
            <text:p>524,319</text:p>
          </table:table-cell>
          <table:table-cell table:style-name="ce39" table:formula="of:=MULTIPLE.OPERATIONS([.$D$69];[.$F$9];[.$D78];[.$F$6];[.N$69])" office:value-type="float" office:value="604801.26426179" calcext:value-type="float">
            <text:p>604,801</text:p>
          </table:table-cell>
          <table:table-cell table:style-name="ce39" table:formula="of:=MULTIPLE.OPERATIONS([.$D$69];[.$F$9];[.$D78];[.$F$6];[.O$69])" office:value-type="float" office:value="685283.736409231" calcext:value-type="float">
            <text:p>685,284</text:p>
          </table:table-cell>
          <table:table-cell table:number-columns-repeated="2"/>
          <table:covered-table-cell table:style-name="ce18"/>
          <table:table-cell table:style-name="ce19" table:formula="of:=+[.T45]" office:value-type="float" office:value="7.29852451022632" calcext:value-type="float">
            <text:p>7.3</text:p>
          </table:table-cell>
          <table:table-cell table:style-name="ce32" table:formula="of:=+[.L45]" office:value-type="percentage" office:value="0.12" calcext:value-type="percentage">
            <text:p>12.0%</text:p>
          </table:table-cell>
          <table:table-cell table:style-name="ce97" table:formula="of:=MULTIPLE.OPERATIONS([.$T$69];[.$F$10];[.$T78];[.$F$7];[.U$69])" office:value-type="float" office:value="-44280.299486471" calcext:value-type="float">
            <text:p>-44,280</text:p>
          </table:table-cell>
          <table:table-cell table:style-name="ce97" table:formula="of:=MULTIPLE.OPERATIONS([.$T$69];[.$F$10];[.$T78];[.$F$7];[.V$69])" office:value-type="float" office:value="-126845.750618462" calcext:value-type="float">
            <text:p>-126,846</text:p>
          </table:table-cell>
          <table:table-cell table:style-name="ce97" table:formula="of:=MULTIPLE.OPERATIONS([.$T$69];[.$F$10];[.$T78];[.$F$7];[.W$69])" office:value-type="float" office:value="-62717.0994776198" calcext:value-type="float">
            <text:p>-62,717</text:p>
          </table:table-cell>
          <table:table-cell table:style-name="ce97" table:formula="of:=MULTIPLE.OPERATIONS([.$T$69];[.$F$10];[.$T78];[.$F$7];[.X$69])" office:value-type="float" office:value="42677.0896559382" calcext:value-type="float">
            <text:p>42,677</text:p>
          </table:table-cell>
          <table:table-cell table:style-name="ce97" table:formula="of:=MULTIPLE.OPERATIONS([.$T$69];[.$F$10];[.$T78];[.$F$7];[.Y$69])" office:value-type="float" office:value="106805.740796781" calcext:value-type="float">
            <text:p>106,806</text:p>
          </table:table-cell>
          <table:table-cell table:style-name="ce97" table:formula="of:=MULTIPLE.OPERATIONS([.$T$69];[.$F$10];[.$T78];[.$F$7];[.Z$69])" office:value-type="float" office:value="170934.391937624" calcext:value-type="float">
            <text:p>170,934</text:p>
          </table:table-cell>
          <table:table-cell table:style-name="ce97" table:formula="of:=MULTIPLE.OPERATIONS([.$T$69];[.$F$10];[.$T78];[.$F$7];[.AA$69])" office:value-type="float" office:value="235063.043078466" calcext:value-type="float">
            <text:p>235,063</text:p>
          </table:table-cell>
          <table:table-cell table:style-name="ce97" table:formula="of:=MULTIPLE.OPERATIONS([.$T$69];[.$F$10];[.$T78];[.$F$7];[.AB$69])" office:value-type="float" office:value="299191.694219309" calcext:value-type="float">
            <text:p>299,192</text:p>
          </table:table-cell>
          <table:table-cell table:style-name="ce97" table:formula="of:=MULTIPLE.OPERATIONS([.$T$69];[.$F$10];[.$T78];[.$F$7];[.AC$69])" office:value-type="float" office:value="363320.345360152" calcext:value-type="float">
            <text:p>363,320</text:p>
          </table:table-cell>
          <table:table-cell table:style-name="ce97" table:formula="of:=MULTIPLE.OPERATIONS([.$T$69];[.$F$10];[.$T78];[.$F$7];[.AD$69])" office:value-type="float" office:value="427448.996500994" calcext:value-type="float">
            <text:p>427,449</text:p>
          </table:table-cell>
          <table:table-cell table:style-name="ce97" table:formula="of:=MULTIPLE.OPERATIONS([.$T$69];[.$F$10];[.$T78];[.$F$7];[.AE$69])" office:value-type="float" office:value="491577.647641837" calcext:value-type="float">
            <text:p>491,578</text:p>
          </table:table-cell>
          <table:table-cell/>
          <table:covered-table-cell table:style-name="ce18"/>
          <table:table-cell table:style-name="ce19" table:formula="of:=+[.T45]" office:value-type="float" office:value="7.29852451022632" calcext:value-type="float">
            <text:p>7.3</text:p>
          </table:table-cell>
          <table:table-cell table:style-name="ce32" table:formula="of:=+[.U45]" office:value-type="percentage" office:value="0.12" calcext:value-type="percentage">
            <text:p>12.0%</text:p>
          </table:table-cell>
          <table:table-cell table:style-name="ce109" table:formula="of:=MULTIPLE.OPERATIONS([.$AI$69];[.$F$11];[.$AI78];[.$F$8];[.AJ$69])" office:value-type="float" office:value="190250.475325972" calcext:value-type="float">
            <text:p>190250.5</text:p>
          </table:table-cell>
          <table:table-cell table:style-name="ce109" table:formula="of:=MULTIPLE.OPERATIONS([.$AI$69];[.$F$11];[.$AI78];[.$F$8];[.AK$69])" office:value-type="float" office:value="206242.834212817" calcext:value-type="float">
            <text:p>206242.8</text:p>
          </table:table-cell>
          <table:table-cell table:style-name="ce109" table:formula="of:=MULTIPLE.OPERATIONS([.$AI$69];[.$F$11];[.$AI78];[.$F$8];[.AL$69])" office:value-type="float" office:value="222235.193099661" calcext:value-type="float">
            <text:p>222235.2</text:p>
          </table:table-cell>
          <table:table-cell table:style-name="ce109" table:formula="of:=MULTIPLE.OPERATIONS([.$AI$69];[.$F$11];[.$AI78];[.$F$8];[.AM$69])" office:value-type="float" office:value="249870.434368659" calcext:value-type="float">
            <text:p>249870.4</text:p>
          </table:table-cell>
          <table:table-cell table:style-name="ce109" table:formula="of:=MULTIPLE.OPERATIONS([.$AI$69];[.$F$11];[.$AI78];[.$F$8];[.AN$69])" office:value-type="float" office:value="265862.793255504" calcext:value-type="float">
            <text:p>265862.8</text:p>
          </table:table-cell>
          <table:table-cell table:style-name="ce109" table:formula="of:=MULTIPLE.OPERATIONS([.$AI$69];[.$F$11];[.$AI78];[.$F$8];[.AO$69])" office:value-type="float" office:value="281855.152142349" calcext:value-type="float">
            <text:p>281855.2</text:p>
          </table:table-cell>
          <table:table-cell table:style-name="ce109" table:formula="of:=MULTIPLE.OPERATIONS([.$AI$69];[.$F$11];[.$AI78];[.$F$8];[.AP$69])" office:value-type="float" office:value="297847.511029193" calcext:value-type="float">
            <text:p>297847.5</text:p>
          </table:table-cell>
          <table:table-cell table:style-name="ce109" table:formula="of:=MULTIPLE.OPERATIONS([.$AI$69];[.$F$11];[.$AI78];[.$F$8];[.AQ$69])" office:value-type="float" office:value="313839.869916038" calcext:value-type="float">
            <text:p>313839.9</text:p>
          </table:table-cell>
          <table:table-cell table:style-name="ce109" table:formula="of:=MULTIPLE.OPERATIONS([.$AI$69];[.$F$11];[.$AI78];[.$F$8];[.AR$69])" office:value-type="float" office:value="329832.228802883" calcext:value-type="float">
            <text:p>329832.2</text:p>
          </table:table-cell>
          <table:table-cell table:style-name="ce109" table:formula="of:=MULTIPLE.OPERATIONS([.$AI$69];[.$F$11];[.$AI78];[.$F$8];[.AS$69])" office:value-type="float" office:value="345824.587689728" calcext:value-type="float">
            <text:p>345824.6</text:p>
          </table:table-cell>
          <table:table-cell table:style-name="ce109" table:formula="of:=MULTIPLE.OPERATIONS([.$AI$69];[.$F$11];[.$AI78];[.$F$8];[.AT$69])" office:value-type="float" office:value="463499.664810987" calcext:value-type="float">
            <text:p>463499.7</text:p>
          </table:table-cell>
          <table:table-cell table:number-columns-repeated="16338"/>
        </table:table-row>
        <table:table-row table:style-name="ro1">
          <table:table-cell/>
          <table:covered-table-cell table:style-name="ce18"/>
          <table:table-cell table:style-name="ce19" table:formula="of:=+[.D46]" office:value-type="float" office:value="9.3082276465488" calcext:value-type="float">
            <text:p>9.3</text:p>
          </table:table-cell>
          <table:table-cell table:style-name="ce32" table:formula="of:=+[.E46]" office:value-type="percentage" office:value="0.155024830214794" calcext:value-type="percentage">
            <text:p>15.5%</text:p>
          </table:table-cell>
          <table:table-cell table:style-name="ce39" table:formula="of:=MULTIPLE.OPERATIONS([.$D$69];[.$F$9];[.$D79];[.$F$6];[.E$69])" office:value-type="float" office:value="-164017.463805701" calcext:value-type="float">
            <text:p>-164,017</text:p>
          </table:table-cell>
          <table:table-cell table:style-name="ce39" table:formula="of:=MULTIPLE.OPERATIONS([.$D$69];[.$F$9];[.$D79];[.$F$6];[.F$69])" office:value-type="float" office:value="-83534.9916582592" calcext:value-type="float">
            <text:p>-83,535</text:p>
          </table:table-cell>
          <table:table-cell table:style-name="ce39" table:formula="of:=MULTIPLE.OPERATIONS([.$D$69];[.$F$9];[.$D79];[.$F$6];[.G$69])" office:value-type="float" office:value="-3052.51951081783" calcext:value-type="float">
            <text:p>-3,053</text:p>
          </table:table-cell>
          <table:table-cell table:style-name="ce39" table:formula="of:=MULTIPLE.OPERATIONS([.$D$69];[.$F$9];[.$D79];[.$F$6];[.H$69])" office:value-type="float" office:value="69185.8050514702" calcext:value-type="float">
            <text:p>69,186</text:p>
          </table:table-cell>
          <table:table-cell table:style-name="ce39" table:formula="of:=MULTIPLE.OPERATIONS([.$D$69];[.$F$9];[.$D79];[.$F$6];[.I$69])" office:value-type="float" office:value="149668.277198911" calcext:value-type="float">
            <text:p>149,668</text:p>
          </table:table-cell>
          <table:table-cell table:style-name="ce39" table:formula="of:=MULTIPLE.OPERATIONS([.$D$69];[.$F$9];[.$D79];[.$F$6];[.J$69])" office:value-type="float" office:value="230150.749346353" calcext:value-type="float">
            <text:p>230,151</text:p>
          </table:table-cell>
          <table:table-cell table:style-name="ce39" table:formula="of:=MULTIPLE.OPERATIONS([.$D$69];[.$F$9];[.$D79];[.$F$6];[.K$69])" office:value-type="float" office:value="310633.221493794" calcext:value-type="float">
            <text:p>310,633</text:p>
          </table:table-cell>
          <table:table-cell table:style-name="ce39" table:formula="of:=MULTIPLE.OPERATIONS([.$D$69];[.$F$9];[.$D79];[.$F$6];[.L$69])" office:value-type="float" office:value="391115.693641235" calcext:value-type="float">
            <text:p>391,116</text:p>
          </table:table-cell>
          <table:table-cell table:style-name="ce39" table:formula="of:=MULTIPLE.OPERATIONS([.$D$69];[.$F$9];[.$D79];[.$F$6];[.M$69])" office:value-type="float" office:value="471598.165788676" calcext:value-type="float">
            <text:p>471,598</text:p>
          </table:table-cell>
          <table:table-cell table:style-name="ce39" table:formula="of:=MULTIPLE.OPERATIONS([.$D$69];[.$F$9];[.$D79];[.$F$6];[.N$69])" office:value-type="float" office:value="552080.637936116" calcext:value-type="float">
            <text:p>552,081</text:p>
          </table:table-cell>
          <table:table-cell table:style-name="ce39" table:formula="of:=MULTIPLE.OPERATIONS([.$D$69];[.$F$9];[.$D79];[.$F$6];[.O$69])" office:value-type="float" office:value="632563.110083558" calcext:value-type="float">
            <text:p>632,563</text:p>
          </table:table-cell>
          <table:table-cell table:number-columns-repeated="2"/>
          <table:covered-table-cell table:style-name="ce18"/>
          <table:table-cell table:style-name="ce19" table:formula="of:=+[.T46]" office:value-type="float" office:value="7.55918609987725" calcext:value-type="float">
            <text:p>7.6</text:p>
          </table:table-cell>
          <table:table-cell table:style-name="ce32" table:formula="of:=+[.L46]" office:value-type="percentage" office:value="0.16" calcext:value-type="percentage">
            <text:p>16.0%</text:p>
          </table:table-cell>
          <table:table-cell table:style-name="ce97" table:formula="of:=MULTIPLE.OPERATIONS([.$T$69];[.$F$10];[.$T79];[.$F$7];[.U$69])" office:value-type="float" office:value="-92904.0230199808" calcext:value-type="float">
            <text:p>-92,904</text:p>
          </table:table-cell>
          <table:table-cell table:style-name="ce97" table:formula="of:=MULTIPLE.OPERATIONS([.$T$69];[.$F$10];[.$T79];[.$F$7];[.V$69])" office:value-type="float" office:value="-175469.474151972" calcext:value-type="float">
            <text:p>-175,469</text:p>
          </table:table-cell>
          <table:table-cell table:style-name="ce97" table:formula="of:=MULTIPLE.OPERATIONS([.$T$69];[.$F$10];[.$T79];[.$F$7];[.W$69])" office:value-type="float" office:value="-111340.82301113" calcext:value-type="float">
            <text:p>-111,341</text:p>
          </table:table-cell>
          <table:table-cell table:style-name="ce97" table:formula="of:=MULTIPLE.OPERATIONS([.$T$69];[.$F$10];[.$T79];[.$F$7];[.X$69])" office:value-type="float" office:value="-5946.63387757144" calcext:value-type="float">
            <text:p>-5,947</text:p>
          </table:table-cell>
          <table:table-cell table:style-name="ce97" table:formula="of:=MULTIPLE.OPERATIONS([.$T$69];[.$F$10];[.$T79];[.$F$7];[.Y$69])" office:value-type="float" office:value="58182.0172632708" calcext:value-type="float">
            <text:p>58,182</text:p>
          </table:table-cell>
          <table:table-cell table:style-name="ce97" table:formula="of:=MULTIPLE.OPERATIONS([.$T$69];[.$F$10];[.$T79];[.$F$7];[.Z$69])" office:value-type="float" office:value="122310.668404114" calcext:value-type="float">
            <text:p>122,311</text:p>
          </table:table-cell>
          <table:table-cell table:style-name="ce97" table:formula="of:=MULTIPLE.OPERATIONS([.$T$69];[.$F$10];[.$T79];[.$F$7];[.AA$69])" office:value-type="float" office:value="186439.319544956" calcext:value-type="float">
            <text:p>186,439</text:p>
          </table:table-cell>
          <table:table-cell table:style-name="ce97" table:formula="of:=MULTIPLE.OPERATIONS([.$T$69];[.$F$10];[.$T79];[.$F$7];[.AB$69])" office:value-type="float" office:value="250567.970685799" calcext:value-type="float">
            <text:p>250,568</text:p>
          </table:table-cell>
          <table:table-cell table:style-name="ce97" table:formula="of:=MULTIPLE.OPERATIONS([.$T$69];[.$F$10];[.$T79];[.$F$7];[.AC$69])" office:value-type="float" office:value="314696.621826642" calcext:value-type="float">
            <text:p>314,697</text:p>
          </table:table-cell>
          <table:table-cell table:style-name="ce97" table:formula="of:=MULTIPLE.OPERATIONS([.$T$69];[.$F$10];[.$T79];[.$F$7];[.AD$69])" office:value-type="float" office:value="378825.272967484" calcext:value-type="float">
            <text:p>378,825</text:p>
          </table:table-cell>
          <table:table-cell table:style-name="ce97" table:formula="of:=MULTIPLE.OPERATIONS([.$T$69];[.$F$10];[.$T79];[.$F$7];[.AE$69])" office:value-type="float" office:value="442953.924108327" calcext:value-type="float">
            <text:p>442,954</text:p>
          </table:table-cell>
          <table:table-cell/>
          <table:covered-table-cell table:style-name="ce18"/>
          <table:table-cell table:style-name="ce19" table:formula="of:=+[.T46]" office:value-type="float" office:value="7.55918609987725" calcext:value-type="float">
            <text:p>7.6</text:p>
          </table:table-cell>
          <table:table-cell table:style-name="ce32" table:formula="of:=+[.U46]" office:value-type="percentage" office:value="0.16" calcext:value-type="percentage">
            <text:p>16.0%</text:p>
          </table:table-cell>
          <table:table-cell table:style-name="ce109" table:formula="of:=MULTIPLE.OPERATIONS([.$AI$69];[.$F$11];[.$AI79];[.$F$8];[.AJ$69])" office:value-type="float" office:value="178600.338527371" calcext:value-type="float">
            <text:p>178600.3</text:p>
          </table:table-cell>
          <table:table-cell table:style-name="ce109" table:formula="of:=MULTIPLE.OPERATIONS([.$AI$69];[.$F$11];[.$AI79];[.$F$8];[.AK$69])" office:value-type="float" office:value="194592.697414215" calcext:value-type="float">
            <text:p>194592.7</text:p>
          </table:table-cell>
          <table:table-cell table:style-name="ce109" table:formula="of:=MULTIPLE.OPERATIONS([.$AI$69];[.$F$11];[.$AI79];[.$F$8];[.AL$69])" office:value-type="float" office:value="210585.05630106" calcext:value-type="float">
            <text:p>210585.1</text:p>
          </table:table-cell>
          <table:table-cell table:style-name="ce109" table:formula="of:=MULTIPLE.OPERATIONS([.$AI$69];[.$F$11];[.$AI79];[.$F$8];[.AM$69])" office:value-type="float" office:value="238220.297570058" calcext:value-type="float">
            <text:p>238220.3</text:p>
          </table:table-cell>
          <table:table-cell table:style-name="ce109" table:formula="of:=MULTIPLE.OPERATIONS([.$AI$69];[.$F$11];[.$AI79];[.$F$8];[.AN$69])" office:value-type="float" office:value="254212.656456903" calcext:value-type="float">
            <text:p>254212.7</text:p>
          </table:table-cell>
          <table:table-cell table:style-name="ce109" table:formula="of:=MULTIPLE.OPERATIONS([.$AI$69];[.$F$11];[.$AI79];[.$F$8];[.AO$69])" office:value-type="float" office:value="270205.015343748" calcext:value-type="float">
            <text:p>270205.0</text:p>
          </table:table-cell>
          <table:table-cell table:style-name="ce109" table:formula="of:=MULTIPLE.OPERATIONS([.$AI$69];[.$F$11];[.$AI79];[.$F$8];[.AP$69])" office:value-type="float" office:value="286197.374230592" calcext:value-type="float">
            <text:p>286197.4</text:p>
          </table:table-cell>
          <table:table-cell table:style-name="ce109" table:formula="of:=MULTIPLE.OPERATIONS([.$AI$69];[.$F$11];[.$AI79];[.$F$8];[.AQ$69])" office:value-type="float" office:value="302189.733117437" calcext:value-type="float">
            <text:p>302189.7</text:p>
          </table:table-cell>
          <table:table-cell table:style-name="ce109" table:formula="of:=MULTIPLE.OPERATIONS([.$AI$69];[.$F$11];[.$AI79];[.$F$8];[.AR$69])" office:value-type="float" office:value="318182.092004281" calcext:value-type="float">
            <text:p>318182.1</text:p>
          </table:table-cell>
          <table:table-cell table:style-name="ce109" table:formula="of:=MULTIPLE.OPERATIONS([.$AI$69];[.$F$11];[.$AI79];[.$F$8];[.AS$69])" office:value-type="float" office:value="334174.450891126" calcext:value-type="float">
            <text:p>334174.5</text:p>
          </table:table-cell>
          <table:table-cell table:style-name="ce109" table:formula="of:=MULTIPLE.OPERATIONS([.$AI$69];[.$F$11];[.$AI79];[.$F$8];[.AT$69])" office:value-type="float" office:value="463499.664810987" calcext:value-type="float">
            <text:p>463499.7</text:p>
          </table:table-cell>
          <table:table-cell table:number-columns-repeated="16338"/>
        </table:table-row>
        <table:table-row table:style-name="ro1">
          <table:table-cell/>
          <table:covered-table-cell table:style-name="ce18"/>
          <table:table-cell table:style-name="ce19" table:formula="of:=+[.D47]" office:value-type="float" office:value="9.63058357875219" calcext:value-type="float">
            <text:p>9.6</text:p>
          </table:table-cell>
          <table:table-cell table:style-name="ce32" table:formula="of:=+[.E47]" office:value-type="percentage" office:value="0.195024830214794" calcext:value-type="percentage">
            <text:p>19.5%</text:p>
          </table:table-cell>
          <table:table-cell table:style-name="ce39" table:formula="of:=MULTIPLE.OPERATIONS([.$D$69];[.$F$9];[.$D80];[.$F$6];[.E$69])" office:value-type="float" office:value="-224226.893518687" calcext:value-type="float">
            <text:p>-224,227</text:p>
          </table:table-cell>
          <table:table-cell table:style-name="ce39" table:formula="of:=MULTIPLE.OPERATIONS([.$D$69];[.$F$9];[.$D80];[.$F$6];[.F$69])" office:value-type="float" office:value="-143744.421371246" calcext:value-type="float">
            <text:p>-143,744</text:p>
          </table:table-cell>
          <table:table-cell table:style-name="ce39" table:formula="of:=MULTIPLE.OPERATIONS([.$D$69];[.$F$9];[.$D80];[.$F$6];[.G$69])" office:value-type="float" office:value="-63261.9492238045" calcext:value-type="float">
            <text:p>-63,262</text:p>
          </table:table-cell>
          <table:table-cell table:style-name="ce39" table:formula="of:=MULTIPLE.OPERATIONS([.$D$69];[.$F$9];[.$D80];[.$F$6];[.H$69])" office:value-type="float" office:value="8976.3753384836" calcext:value-type="float">
            <text:p>8,976</text:p>
          </table:table-cell>
          <table:table-cell table:style-name="ce39" table:formula="of:=MULTIPLE.OPERATIONS([.$D$69];[.$F$9];[.$D80];[.$F$6];[.I$69])" office:value-type="float" office:value="89458.8474859245" calcext:value-type="float">
            <text:p>89,459</text:p>
          </table:table-cell>
          <table:table-cell table:style-name="ce39" table:formula="of:=MULTIPLE.OPERATIONS([.$D$69];[.$F$9];[.$D80];[.$F$6];[.J$69])" office:value-type="float" office:value="169941.319633366" calcext:value-type="float">
            <text:p>169,941</text:p>
          </table:table-cell>
          <table:table-cell table:style-name="ce39" table:formula="of:=MULTIPLE.OPERATIONS([.$D$69];[.$F$9];[.$D80];[.$F$6];[.K$69])" office:value-type="float" office:value="250423.791780807" calcext:value-type="float">
            <text:p>250,424</text:p>
          </table:table-cell>
          <table:table-cell table:style-name="ce39" table:formula="of:=MULTIPLE.OPERATIONS([.$D$69];[.$F$9];[.$D80];[.$F$6];[.L$69])" office:value-type="float" office:value="330906.263928248" calcext:value-type="float">
            <text:p>330,906</text:p>
          </table:table-cell>
          <table:table-cell table:style-name="ce39" table:formula="of:=MULTIPLE.OPERATIONS([.$D$69];[.$F$9];[.$D80];[.$F$6];[.M$69])" office:value-type="float" office:value="411388.736075689" calcext:value-type="float">
            <text:p>411,389</text:p>
          </table:table-cell>
          <table:table-cell table:style-name="ce39" table:formula="of:=MULTIPLE.OPERATIONS([.$D$69];[.$F$9];[.$D80];[.$F$6];[.N$69])" office:value-type="float" office:value="491871.20822313" calcext:value-type="float">
            <text:p>491,871</text:p>
          </table:table-cell>
          <table:table-cell table:style-name="ce39" table:formula="of:=MULTIPLE.OPERATIONS([.$D$69];[.$F$9];[.$D80];[.$F$6];[.O$69])" office:value-type="float" office:value="572353.680370571" calcext:value-type="float">
            <text:p>572,354</text:p>
          </table:table-cell>
          <table:table-cell table:number-columns-repeated="2"/>
          <table:covered-table-cell table:style-name="ce18"/>
          <table:table-cell table:style-name="ce19" table:formula="of:=+[.T47]" office:value-type="float" office:value="7.8198476895282" calcext:value-type="float">
            <text:p>7.8</text:p>
          </table:table-cell>
          <table:table-cell table:style-name="ce32" table:formula="of:=+[.L47]" office:value-type="percentage" office:value="0.192322219397864" calcext:value-type="percentage">
            <text:p>19.2%</text:p>
          </table:table-cell>
          <table:table-cell table:style-name="ce97" table:formula="of:=MULTIPLE.OPERATIONS([.$T$69];[.$F$10];[.$T80];[.$F$7];[.U$69])" office:value-type="float" office:value="-132194.68951976" calcext:value-type="float">
            <text:p>-132,195</text:p>
          </table:table-cell>
          <table:table-cell table:style-name="ce97" table:formula="of:=MULTIPLE.OPERATIONS([.$T$69];[.$F$10];[.$T80];[.$F$7];[.V$69])" office:value-type="float" office:value="-214760.140651751" calcext:value-type="float">
            <text:p>-214,760</text:p>
          </table:table-cell>
          <table:table-cell table:style-name="ce97" table:formula="of:=MULTIPLE.OPERATIONS([.$T$69];[.$F$10];[.$T80];[.$F$7];[.W$69])" office:value-type="float" office:value="-150631.489510909" calcext:value-type="float">
            <text:p>-150,631</text:p>
          </table:table-cell>
          <table:table-cell table:style-name="ce97" table:formula="of:=MULTIPLE.OPERATIONS([.$T$69];[.$F$10];[.$T80];[.$F$7];[.X$69])" office:value-type="float" office:value="-45237.300377351" calcext:value-type="float">
            <text:p>-45,237</text:p>
          </table:table-cell>
          <table:table-cell table:style-name="ce97" table:formula="of:=MULTIPLE.OPERATIONS([.$T$69];[.$F$10];[.$T80];[.$F$7];[.Y$69])" office:value-type="float" office:value="18891.3507634912" calcext:value-type="float">
            <text:p>18,891</text:p>
          </table:table-cell>
          <table:table-cell table:style-name="ce97" table:formula="of:=MULTIPLE.OPERATIONS([.$T$69];[.$F$10];[.$T80];[.$F$7];[.Z$69])" office:value-type="float" office:value="83020.0019043343" calcext:value-type="float">
            <text:p>83,020</text:p>
          </table:table-cell>
          <table:table-cell table:style-name="ce97" table:formula="of:=MULTIPLE.OPERATIONS([.$T$69];[.$F$10];[.$T80];[.$F$7];[.AA$69])" office:value-type="float" office:value="147148.653045177" calcext:value-type="float">
            <text:p>147,149</text:p>
          </table:table-cell>
          <table:table-cell table:style-name="ce97" table:formula="of:=MULTIPLE.OPERATIONS([.$T$69];[.$F$10];[.$T80];[.$F$7];[.AB$69])" office:value-type="float" office:value="211277.304186019" calcext:value-type="float">
            <text:p>211,277</text:p>
          </table:table-cell>
          <table:table-cell table:style-name="ce97" table:formula="of:=MULTIPLE.OPERATIONS([.$T$69];[.$F$10];[.$T80];[.$F$7];[.AC$69])" office:value-type="float" office:value="275405.955326862" calcext:value-type="float">
            <text:p>275,406</text:p>
          </table:table-cell>
          <table:table-cell table:style-name="ce97" table:formula="of:=MULTIPLE.OPERATIONS([.$T$69];[.$F$10];[.$T80];[.$F$7];[.AD$69])" office:value-type="float" office:value="339534.606467705" calcext:value-type="float">
            <text:p>339,535</text:p>
          </table:table-cell>
          <table:table-cell table:style-name="ce97" table:formula="of:=MULTIPLE.OPERATIONS([.$T$69];[.$F$10];[.$T80];[.$F$7];[.AE$69])" office:value-type="float" office:value="403663.257608547" calcext:value-type="float">
            <text:p>403,663</text:p>
          </table:table-cell>
          <table:table-cell/>
          <table:covered-table-cell table:style-name="ce18"/>
          <table:table-cell table:style-name="ce19" table:formula="of:=+[.T47]" office:value-type="float" office:value="7.8198476895282" calcext:value-type="float">
            <text:p>7.8</text:p>
          </table:table-cell>
          <table:table-cell table:style-name="ce32" table:formula="of:=+[.U47]" office:value-type="percentage" office:value="0.2" calcext:value-type="percentage">
            <text:p>20.0%</text:p>
          </table:table-cell>
          <table:table-cell table:style-name="ce109" table:formula="of:=MULTIPLE.OPERATIONS([.$AI$69];[.$F$11];[.$AI80];[.$F$8];[.AJ$69])" office:value-type="float" office:value="166950.201728769" calcext:value-type="float">
            <text:p>166950.2</text:p>
          </table:table-cell>
          <table:table-cell table:style-name="ce109" table:formula="of:=MULTIPLE.OPERATIONS([.$AI$69];[.$F$11];[.$AI80];[.$F$8];[.AK$69])" office:value-type="float" office:value="182942.560615614" calcext:value-type="float">
            <text:p>182942.6</text:p>
          </table:table-cell>
          <table:table-cell table:style-name="ce109" table:formula="of:=MULTIPLE.OPERATIONS([.$AI$69];[.$F$11];[.$AI80];[.$F$8];[.AL$69])" office:value-type="float" office:value="198934.919502459" calcext:value-type="float">
            <text:p>198934.9</text:p>
          </table:table-cell>
          <table:table-cell table:style-name="ce109" table:formula="of:=MULTIPLE.OPERATIONS([.$AI$69];[.$F$11];[.$AI80];[.$F$8];[.AM$69])" office:value-type="float" office:value="226570.160771457" calcext:value-type="float">
            <text:p>226570.2</text:p>
          </table:table-cell>
          <table:table-cell table:style-name="ce109" table:formula="of:=MULTIPLE.OPERATIONS([.$AI$69];[.$F$11];[.$AI80];[.$F$8];[.AN$69])" office:value-type="float" office:value="242562.519658302" calcext:value-type="float">
            <text:p>242562.5</text:p>
          </table:table-cell>
          <table:table-cell table:style-name="ce109" table:formula="of:=MULTIPLE.OPERATIONS([.$AI$69];[.$F$11];[.$AI80];[.$F$8];[.AO$69])" office:value-type="float" office:value="258554.878545146" calcext:value-type="float">
            <text:p>258554.9</text:p>
          </table:table-cell>
          <table:table-cell table:style-name="ce109" table:formula="of:=MULTIPLE.OPERATIONS([.$AI$69];[.$F$11];[.$AI80];[.$F$8];[.AP$69])" office:value-type="float" office:value="274547.237431991" calcext:value-type="float">
            <text:p>274547.2</text:p>
          </table:table-cell>
          <table:table-cell table:style-name="ce109" table:formula="of:=MULTIPLE.OPERATIONS([.$AI$69];[.$F$11];[.$AI80];[.$F$8];[.AQ$69])" office:value-type="float" office:value="290539.596318836" calcext:value-type="float">
            <text:p>290539.6</text:p>
          </table:table-cell>
          <table:table-cell table:style-name="ce109" table:formula="of:=MULTIPLE.OPERATIONS([.$AI$69];[.$F$11];[.$AI80];[.$F$8];[.AR$69])" office:value-type="float" office:value="306531.95520568" calcext:value-type="float">
            <text:p>306532.0</text:p>
          </table:table-cell>
          <table:table-cell table:style-name="ce109" table:formula="of:=MULTIPLE.OPERATIONS([.$AI$69];[.$F$11];[.$AI80];[.$F$8];[.AS$69])" office:value-type="float" office:value="322524.314092525" calcext:value-type="float">
            <text:p>322524.3</text:p>
          </table:table-cell>
          <table:table-cell table:style-name="ce109" table:formula="of:=MULTIPLE.OPERATIONS([.$AI$69];[.$F$11];[.$AI80];[.$F$8];[.AT$69])" office:value-type="float" office:value="463499.664810987" calcext:value-type="float">
            <text:p>463499.7</text:p>
          </table:table-cell>
          <table:table-cell table:number-columns-repeated="1633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0"/>
          <table:table-cell table:style-name="ce98"/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40" table:formula="of:=+[.$E$68]-[.C70]" office:value-type="float" office:value="2.39342116355875" calcext:value-type="float">
            <text:p>2.4</text:p>
          </table:table-cell>
          <table:table-cell table:style-name="ce40" table:formula="of:=+[.$F$68]-[.C70]" office:value-type="float" office:value="2.8337601466096" calcext:value-type="float">
            <text:p>2.8</text:p>
          </table:table-cell>
          <table:table-cell table:style-name="ce40" table:formula="of:=+[.$G$68]-[.C70]" office:value-type="float" office:value="3.27409912966044" calcext:value-type="float">
            <text:p>3.3</text:p>
          </table:table-cell>
          <table:table-cell table:style-name="ce40" table:formula="of:=+[.$H$68]-[.C70]" office:value-type="float" office:value="3.66933239631236" calcext:value-type="float">
            <text:p>3.7</text:p>
          </table:table-cell>
          <table:table-cell table:style-name="ce40" table:formula="of:=+[.$I$68]-[.C70]" office:value-type="float" office:value="4.10967137936321" calcext:value-type="float">
            <text:p>4.1</text:p>
          </table:table-cell>
          <table:table-cell table:style-name="ce40" table:formula="of:=+[.$J$68]-[.C70]" office:value-type="float" office:value="4.55001036241406" calcext:value-type="float">
            <text:p>4.6</text:p>
          </table:table-cell>
          <table:table-cell table:style-name="ce40" table:formula="of:=+[.$K$68]-[.C70]" office:value-type="float" office:value="4.99034934546491" calcext:value-type="float">
            <text:p>5.0</text:p>
          </table:table-cell>
          <table:table-cell table:style-name="ce40" table:formula="of:=+[.$L$68]-[.C70]" office:value-type="float" office:value="5.43068832851575" calcext:value-type="float">
            <text:p>5.4</text:p>
          </table:table-cell>
          <table:table-cell table:style-name="ce40" table:formula="of:=+[.$M$68]-[.C70]" office:value-type="float" office:value="5.8710273115666" calcext:value-type="float">
            <text:p>5.9</text:p>
          </table:table-cell>
          <table:table-cell table:style-name="ce40" table:formula="of:=+[.$N$68]-[.C70]" office:value-type="float" office:value="6.31136629461745" calcext:value-type="float">
            <text:p>6.3</text:p>
          </table:table-cell>
          <table:table-cell table:style-name="ce40" table:formula="of:=+[.$O$68]-[.C70]" office:value-type="float" office:value="6.75170527766829" calcext:value-type="float">
            <text:p>6.8</text:p>
          </table:table-cell>
          <table:table-cell table:number-columns-repeated="5"/>
          <table:table-cell table:style-name="ce99" table:formula="of:=+[.$U$68]-[.S70]" office:value-type="float" office:value="3.52883794189717" calcext:value-type="float">
            <text:p>3.5</text:p>
          </table:table-cell>
          <table:table-cell table:style-name="ce99" table:formula="of:=+[.$V$68]-[.S70]" office:value-type="float" office:value="3.97066845037175" calcext:value-type="float">
            <text:p>4.0</text:p>
          </table:table-cell>
          <table:table-cell table:style-name="ce99" table:formula="of:=+[.$W$68]-[.S70]" office:value-type="float" office:value="4.41249895884633" calcext:value-type="float">
            <text:p>4.4</text:p>
          </table:table-cell>
          <table:table-cell table:style-name="ce99" table:formula="of:=+[.$X$68]-[.S70]" office:value-type="float" office:value="5.13863879411082" calcext:value-type="float">
            <text:p>5.1</text:p>
          </table:table-cell>
          <table:table-cell table:style-name="ce99" table:formula="of:=+[.$Y$68]-[.S70]" office:value-type="float" office:value="5.58046930258539" calcext:value-type="float">
            <text:p>5.6</text:p>
          </table:table-cell>
          <table:table-cell table:number-columns-repeated="16359"/>
        </table:table-row>
        <table:table-row table:style-name="ro1">
          <table:table-cell table:number-columns-repeated="4"/>
          <table:table-cell table:style-name="ce40" table:formula="of:=+[.$E$68]-[.C71]" office:value-type="float" office:value="2.07106523135536" calcext:value-type="float">
            <text:p>2.1</text:p>
          </table:table-cell>
          <table:table-cell table:style-name="ce40" table:formula="of:=+[.$F$68]-[.C71]" office:value-type="float" office:value="2.51140421440621" calcext:value-type="float">
            <text:p>2.5</text:p>
          </table:table-cell>
          <table:table-cell table:style-name="ce40" table:formula="of:=+[.$G$68]-[.C71]" office:value-type="float" office:value="2.95174319745705" calcext:value-type="float">
            <text:p>3.0</text:p>
          </table:table-cell>
          <table:table-cell table:style-name="ce40" table:formula="of:=+[.$H$68]-[.C71]" office:value-type="float" office:value="3.34697646410897" calcext:value-type="float">
            <text:p>3.3</text:p>
          </table:table-cell>
          <table:table-cell table:style-name="ce40" table:formula="of:=+[.$I$68]-[.C71]" office:value-type="float" office:value="3.78731544715982" calcext:value-type="float">
            <text:p>3.8</text:p>
          </table:table-cell>
          <table:table-cell table:style-name="ce40" table:formula="of:=+[.$J$68]-[.C71]" office:value-type="float" office:value="4.22765443021067" calcext:value-type="float">
            <text:p>4.2</text:p>
          </table:table-cell>
          <table:table-cell table:style-name="ce40" table:formula="of:=+[.$K$68]-[.C71]" office:value-type="float" office:value="4.66799341326152" calcext:value-type="float">
            <text:p>4.7</text:p>
          </table:table-cell>
          <table:table-cell table:style-name="ce40" table:formula="of:=+[.$L$68]-[.C71]" office:value-type="float" office:value="5.10833239631236" calcext:value-type="float">
            <text:p>5.1</text:p>
          </table:table-cell>
          <table:table-cell table:style-name="ce40" table:formula="of:=+[.$M$68]-[.C71]" office:value-type="float" office:value="5.54867137936321" calcext:value-type="float">
            <text:p>5.5</text:p>
          </table:table-cell>
          <table:table-cell table:style-name="ce40" table:formula="of:=+[.$N$68]-[.C71]" office:value-type="float" office:value="5.98901036241406" calcext:value-type="float">
            <text:p>6.0</text:p>
          </table:table-cell>
          <table:table-cell table:style-name="ce40" table:formula="of:=+[.$O$68]-[.C71]" office:value-type="float" office:value="6.4293493454649" calcext:value-type="float">
            <text:p>6.4</text:p>
          </table:table-cell>
          <table:table-cell table:number-columns-repeated="5"/>
          <table:table-cell table:style-name="ce99" table:formula="of:=+[.$U$68]-[.S71]" office:value-type="float" office:value="3.26817635224623" calcext:value-type="float">
            <text:p>3.3</text:p>
          </table:table-cell>
          <table:table-cell table:style-name="ce99" table:formula="of:=+[.$V$68]-[.S71]" office:value-type="float" office:value="3.71000686072081" calcext:value-type="float">
            <text:p>3.7</text:p>
          </table:table-cell>
          <table:table-cell table:style-name="ce99" table:formula="of:=+[.$W$68]-[.S71]" office:value-type="float" office:value="4.15183736919539" calcext:value-type="float">
            <text:p>4.2</text:p>
          </table:table-cell>
          <table:table-cell table:style-name="ce99" table:formula="of:=+[.$X$68]-[.S71]" office:value-type="float" office:value="4.87797720445988" calcext:value-type="float">
            <text:p>4.9</text:p>
          </table:table-cell>
          <table:table-cell table:style-name="ce99" table:formula="of:=+[.$Y$68]-[.S71]" office:value-type="float" office:value="5.31980771293445" calcext:value-type="float">
            <text:p>5.3</text:p>
          </table:table-cell>
          <table:table-cell table:number-columns-repeated="16359"/>
        </table:table-row>
        <table:table-row table:style-name="ro1">
          <table:table-cell table:number-columns-repeated="4"/>
          <table:table-cell table:style-name="ce40" table:formula="of:=+[.$E$68]-[.C72]" office:value-type="float" office:value="1.74870929915197" calcext:value-type="float">
            <text:p>1.7</text:p>
          </table:table-cell>
          <table:table-cell table:style-name="ce40" table:formula="of:=+[.$F$68]-[.C72]" office:value-type="float" office:value="2.18904828220282" calcext:value-type="float">
            <text:p>2.2</text:p>
          </table:table-cell>
          <table:table-cell table:style-name="ce40" table:formula="of:=+[.$G$68]-[.C72]" office:value-type="float" office:value="2.62938726525367" calcext:value-type="float">
            <text:p>2.6</text:p>
          </table:table-cell>
          <table:table-cell table:style-name="ce40" table:formula="of:=+[.$H$68]-[.C72]" office:value-type="float" office:value="3.02462053190558" calcext:value-type="float">
            <text:p>3.0</text:p>
          </table:table-cell>
          <table:table-cell table:style-name="ce40" table:formula="of:=+[.$I$68]-[.C72]" office:value-type="float" office:value="3.46495951495643" calcext:value-type="float">
            <text:p>3.5</text:p>
          </table:table-cell>
          <table:table-cell table:style-name="ce40" table:formula="of:=+[.$J$68]-[.C72]" office:value-type="float" office:value="3.90529849800728" calcext:value-type="float">
            <text:p>3.9</text:p>
          </table:table-cell>
          <table:table-cell table:style-name="ce40" table:formula="of:=+[.$K$68]-[.C72]" office:value-type="float" office:value="4.34563748105813" calcext:value-type="float">
            <text:p>4.3</text:p>
          </table:table-cell>
          <table:table-cell table:style-name="ce40" table:formula="of:=+[.$L$68]-[.C72]" office:value-type="float" office:value="4.78597646410897" calcext:value-type="float">
            <text:p>4.8</text:p>
          </table:table-cell>
          <table:table-cell table:style-name="ce40" table:formula="of:=+[.$M$68]-[.C72]" office:value-type="float" office:value="5.22631544715982" calcext:value-type="float">
            <text:p>5.2</text:p>
          </table:table-cell>
          <table:table-cell table:style-name="ce40" table:formula="of:=+[.$N$68]-[.C72]" office:value-type="float" office:value="5.66665443021067" calcext:value-type="float">
            <text:p>5.7</text:p>
          </table:table-cell>
          <table:table-cell table:style-name="ce40" table:formula="of:=+[.$O$68]-[.C72]" office:value-type="float" office:value="6.10699341326152" calcext:value-type="float">
            <text:p>6.1</text:p>
          </table:table-cell>
          <table:table-cell table:number-columns-repeated="5"/>
          <table:table-cell table:style-name="ce99" table:formula="of:=+[.$U$68]-[.S72]" office:value-type="float" office:value="3.00751476259529" calcext:value-type="float">
            <text:p>3.0</text:p>
          </table:table-cell>
          <table:table-cell table:style-name="ce99" table:formula="of:=+[.$V$68]-[.S72]" office:value-type="float" office:value="3.44934527106987" calcext:value-type="float">
            <text:p>3.4</text:p>
          </table:table-cell>
          <table:table-cell table:style-name="ce99" table:formula="of:=+[.$W$68]-[.S72]" office:value-type="float" office:value="3.89117577954445" calcext:value-type="float">
            <text:p>3.9</text:p>
          </table:table-cell>
          <table:table-cell table:style-name="ce99" table:formula="of:=+[.$X$68]-[.S72]" office:value-type="float" office:value="4.61731561480894" calcext:value-type="float">
            <text:p>4.6</text:p>
          </table:table-cell>
          <table:table-cell table:style-name="ce99" table:formula="of:=+[.$Y$68]-[.S72]" office:value-type="float" office:value="5.05914612328351" calcext:value-type="float">
            <text:p>5.1</text:p>
          </table:table-cell>
          <table:table-cell table:number-columns-repeated="16359"/>
        </table:table-row>
        <table:table-row table:style-name="ro1">
          <table:table-cell table:number-columns-repeated="4"/>
          <table:table-cell table:style-name="ce41" table:formula="of:=+[.$E$68]-[.C73]" office:value-type="float" office:value="1.43769893673791" calcext:value-type="float">
            <text:p>1.4</text:p>
          </table:table-cell>
          <table:table-cell table:style-name="ce40" table:formula="of:=+[.$F$68]-[.C73]" office:value-type="float" office:value="1.87803791978876" calcext:value-type="float">
            <text:p>1.9</text:p>
          </table:table-cell>
          <table:table-cell table:style-name="ce40" table:formula="of:=+[.$G$68]-[.C73]" office:value-type="float" office:value="2.31837690283961" calcext:value-type="float">
            <text:p>2.3</text:p>
          </table:table-cell>
          <table:table-cell table:style-name="ce40" table:formula="of:=+[.$H$68]-[.C73]" office:value-type="float" office:value="2.71361016949153" calcext:value-type="float">
            <text:p>2.7</text:p>
          </table:table-cell>
          <table:table-cell table:style-name="ce40" table:formula="of:=+[.$I$68]-[.C73]" office:value-type="float" office:value="3.15394915254237" calcext:value-type="float">
            <text:p>3.2</text:p>
          </table:table-cell>
          <table:table-cell table:style-name="ce40" table:formula="of:=+[.$J$68]-[.C73]" office:value-type="float" office:value="3.59428813559322" calcext:value-type="float">
            <text:p>3.6</text:p>
          </table:table-cell>
          <table:table-cell table:style-name="ce40" table:formula="of:=+[.$K$68]-[.C73]" office:value-type="float" office:value="4.03462711864407" calcext:value-type="float">
            <text:p>4.0</text:p>
          </table:table-cell>
          <table:table-cell table:style-name="ce40" table:formula="of:=+[.$L$68]-[.C73]" office:value-type="float" office:value="4.47496610169492" calcext:value-type="float">
            <text:p>4.5</text:p>
          </table:table-cell>
          <table:table-cell table:style-name="ce40" table:formula="of:=+[.$M$68]-[.C73]" office:value-type="float" office:value="4.91530508474576" calcext:value-type="float">
            <text:p>4.9</text:p>
          </table:table-cell>
          <table:table-cell table:style-name="ce40" table:formula="of:=+[.$N$68]-[.C73]" office:value-type="float" office:value="5.35564406779661" calcext:value-type="float">
            <text:p>5.4</text:p>
          </table:table-cell>
          <table:table-cell table:style-name="ce40" table:formula="of:=+[.$O$68]-[.C73]" office:value-type="float" office:value="5.79598305084746" calcext:value-type="float">
            <text:p>5.8</text:p>
          </table:table-cell>
          <table:table-cell table:number-columns-repeated="5"/>
          <table:table-cell table:style-name="ce99" table:formula="of:=+[.$U$68]-[.S73]" office:value-type="float" office:value="2.55708428072999" calcext:value-type="float">
            <text:p>2.6</text:p>
          </table:table-cell>
          <table:table-cell table:style-name="ce99" table:formula="of:=+[.$V$68]-[.S73]" office:value-type="float" office:value="2.99891478920457" calcext:value-type="float">
            <text:p>3.0</text:p>
          </table:table-cell>
          <table:table-cell table:style-name="ce99" table:formula="of:=+[.$W$68]-[.S73]" office:value-type="float" office:value="3.44074529767915" calcext:value-type="float">
            <text:p>3.4</text:p>
          </table:table-cell>
          <table:table-cell table:style-name="ce99" table:formula="of:=+[.$X$68]-[.S73]" office:value-type="float" office:value="4.16688513294364" calcext:value-type="float">
            <text:p>4.2</text:p>
          </table:table-cell>
          <table:table-cell table:style-name="ce99" table:formula="of:=+[.$Y$68]-[.S73]" office:value-type="float" office:value="4.60871564141821" calcext:value-type="float">
            <text:p>4.6</text:p>
          </table:table-cell>
          <table:table-cell table:number-columns-repeated="16359"/>
        </table:table-row>
        <table:table-row table:style-name="ro1">
          <table:table-cell table:number-columns-repeated="4"/>
          <table:table-cell table:style-name="ce41" table:formula="of:=+[.$E$68]-[.C74]" office:value-type="float" office:value="1.11534300453452" calcext:value-type="float">
            <text:p>1.1</text:p>
          </table:table-cell>
          <table:table-cell table:style-name="ce41" table:formula="of:=+[.$F$68]-[.C74]" office:value-type="float" office:value="1.55568198758537" calcext:value-type="float">
            <text:p>1.6</text:p>
          </table:table-cell>
          <table:table-cell table:style-name="ce40" table:formula="of:=+[.$G$68]-[.C74]" office:value-type="float" office:value="1.99602097063622" calcext:value-type="float">
            <text:p>2.0</text:p>
          </table:table-cell>
          <table:table-cell table:style-name="ce40" table:formula="of:=+[.$H$68]-[.C74]" office:value-type="float" office:value="2.39125423728814" calcext:value-type="float">
            <text:p>2.4</text:p>
          </table:table-cell>
          <table:table-cell table:style-name="ce40" table:formula="of:=+[.$I$68]-[.C74]" office:value-type="float" office:value="2.83159322033898" calcext:value-type="float">
            <text:p>2.8</text:p>
          </table:table-cell>
          <table:table-cell table:style-name="ce40" table:formula="of:=+[.$J$68]-[.C74]" office:value-type="float" office:value="3.27193220338983" calcext:value-type="float">
            <text:p>3.3</text:p>
          </table:table-cell>
          <table:table-cell table:style-name="ce40" table:formula="of:=+[.$K$68]-[.C74]" office:value-type="float" office:value="3.71227118644068" calcext:value-type="float">
            <text:p>3.7</text:p>
          </table:table-cell>
          <table:table-cell table:style-name="ce40" table:formula="of:=+[.$L$68]-[.C74]" office:value-type="float" office:value="4.15261016949153" calcext:value-type="float">
            <text:p>4.2</text:p>
          </table:table-cell>
          <table:table-cell table:style-name="ce40" table:formula="of:=+[.$M$68]-[.C74]" office:value-type="float" office:value="4.59294915254237" calcext:value-type="float">
            <text:p>4.6</text:p>
          </table:table-cell>
          <table:table-cell table:style-name="ce40" table:formula="of:=+[.$N$68]-[.C74]" office:value-type="float" office:value="5.03328813559322" calcext:value-type="float">
            <text:p>5.0</text:p>
          </table:table-cell>
          <table:table-cell table:style-name="ce40" table:formula="of:=+[.$O$68]-[.C74]" office:value-type="float" office:value="5.47362711864407" calcext:value-type="float">
            <text:p>5.5</text:p>
          </table:table-cell>
          <table:table-cell table:number-columns-repeated="5"/>
          <table:table-cell table:style-name="ce99" table:formula="of:=+[.$U$68]-[.S74]" office:value-type="float" office:value="2.29642269107906" calcext:value-type="float">
            <text:p>2.3</text:p>
          </table:table-cell>
          <table:table-cell table:style-name="ce99" table:formula="of:=+[.$V$68]-[.S74]" office:value-type="float" office:value="2.73825319955363" calcext:value-type="float">
            <text:p>2.7</text:p>
          </table:table-cell>
          <table:table-cell table:style-name="ce99" table:formula="of:=+[.$W$68]-[.S74]" office:value-type="float" office:value="3.18008370802821" calcext:value-type="float">
            <text:p>3.2</text:p>
          </table:table-cell>
          <table:table-cell table:style-name="ce99" table:formula="of:=+[.$X$68]-[.S74]" office:value-type="float" office:value="3.9062235432927" calcext:value-type="float">
            <text:p>3.9</text:p>
          </table:table-cell>
          <table:table-cell table:style-name="ce99" table:formula="of:=+[.$Y$68]-[.S74]" office:value-type="float" office:value="4.34805405176727" calcext:value-type="float">
            <text:p>4.3</text:p>
          </table:table-cell>
          <table:table-cell table:number-columns-repeated="16359"/>
        </table:table-row>
        <table:table-row table:style-name="ro1">
          <table:table-cell table:number-columns-repeated="4"/>
          <table:table-cell table:style-name="ce41" table:formula="of:=+[.$E$68]-[.C75]" office:value-type="float" office:value="0.792987072331131" calcext:value-type="float">
            <text:p>0.8</text:p>
          </table:table-cell>
          <table:table-cell table:style-name="ce41" table:formula="of:=+[.$F$68]-[.C75]" office:value-type="float" office:value="1.23332605538198" calcext:value-type="float">
            <text:p>1.2</text:p>
          </table:table-cell>
          <table:table-cell table:style-name="ce40" table:formula="of:=+[.$G$68]-[.C75]" office:value-type="float" office:value="1.67366503843283" calcext:value-type="float">
            <text:p>1.7</text:p>
          </table:table-cell>
          <table:table-cell table:style-name="ce40" table:formula="of:=+[.$H$68]-[.C75]" office:value-type="float" office:value="2.06889830508475" calcext:value-type="float">
            <text:p>2.1</text:p>
          </table:table-cell>
          <table:table-cell table:style-name="ce40" table:formula="of:=+[.$I$68]-[.C75]" office:value-type="float" office:value="2.50923728813559" calcext:value-type="float">
            <text:p>2.5</text:p>
          </table:table-cell>
          <table:table-cell table:style-name="ce40" table:formula="of:=+[.$J$68]-[.C75]" office:value-type="float" office:value="2.94957627118644" calcext:value-type="float">
            <text:p>2.9</text:p>
          </table:table-cell>
          <table:table-cell table:style-name="ce40" table:formula="of:=+[.$K$68]-[.C75]" office:value-type="float" office:value="3.38991525423729" calcext:value-type="float">
            <text:p>3.4</text:p>
          </table:table-cell>
          <table:table-cell table:style-name="ce40" table:formula="of:=+[.$L$68]-[.C75]" office:value-type="float" office:value="3.83025423728814" calcext:value-type="float">
            <text:p>3.8</text:p>
          </table:table-cell>
          <table:table-cell table:style-name="ce40" table:formula="of:=+[.$M$68]-[.C75]" office:value-type="float" office:value="4.27059322033898" calcext:value-type="float">
            <text:p>4.3</text:p>
          </table:table-cell>
          <table:table-cell table:style-name="ce40" table:formula="of:=+[.$N$68]-[.C75]" office:value-type="float" office:value="4.71093220338983" calcext:value-type="float">
            <text:p>4.7</text:p>
          </table:table-cell>
          <table:table-cell table:style-name="ce40" table:formula="of:=+[.$O$68]-[.C75]" office:value-type="float" office:value="5.15127118644068" calcext:value-type="float">
            <text:p>5.2</text:p>
          </table:table-cell>
          <table:table-cell table:number-columns-repeated="5"/>
          <table:table-cell table:style-name="ce99" table:formula="of:=+[.$U$68]-[.S75]" office:value-type="float" office:value="0.356538130837203" calcext:value-type="float">
            <text:p>0.4</text:p>
          </table:table-cell>
          <table:table-cell table:style-name="ce99" table:formula="of:=+[.$V$68]-[.S75]" office:value-type="float" office:value="0.79836863931178" calcext:value-type="float">
            <text:p>0.8</text:p>
          </table:table-cell>
          <table:table-cell table:style-name="ce99" table:formula="of:=+[.$W$68]-[.S75]" office:value-type="float" office:value="1.24019914778636" calcext:value-type="float">
            <text:p>1.2</text:p>
          </table:table-cell>
          <table:table-cell table:style-name="ce99" table:formula="of:=+[.$X$68]-[.S75]" office:value-type="float" office:value="1.96633898305085" calcext:value-type="float">
            <text:p>2.0</text:p>
          </table:table-cell>
          <table:table-cell table:style-name="ce99" table:formula="of:=+[.$Y$68]-[.S75]" office:value-type="float" office:value="2.40816949152542" calcext:value-type="float">
            <text:p>2.4</text:p>
          </table:table-cell>
          <table:table-cell table:number-columns-repeated="16359"/>
        </table:table-row>
        <table:table-row table:style-name="ro1">
          <table:table-cell table:number-columns-repeated="4"/>
          <table:table-cell table:style-name="ce41" table:formula="of:=+[.$E$68]-[.C76]" office:value-type="float" office:value="0.470631140127741" calcext:value-type="float">
            <text:p>0.5</text:p>
          </table:table-cell>
          <table:table-cell table:style-name="ce41" table:formula="of:=+[.$F$68]-[.C76]" office:value-type="float" office:value="0.91097012317859" calcext:value-type="float">
            <text:p>0.9</text:p>
          </table:table-cell>
          <table:table-cell table:style-name="ce41" table:formula="of:=+[.$G$68]-[.C76]" office:value-type="float" office:value="1.35130910622944" calcext:value-type="float">
            <text:p>1.4</text:p>
          </table:table-cell>
          <table:table-cell table:style-name="ce40" table:formula="of:=+[.$H$68]-[.C76]" office:value-type="float" office:value="1.74654237288136" calcext:value-type="float">
            <text:p>1.7</text:p>
          </table:table-cell>
          <table:table-cell table:style-name="ce40" table:formula="of:=+[.$I$68]-[.C76]" office:value-type="float" office:value="2.1868813559322" calcext:value-type="float">
            <text:p>2.2</text:p>
          </table:table-cell>
          <table:table-cell table:style-name="ce40" table:formula="of:=+[.$J$68]-[.C76]" office:value-type="float" office:value="2.62722033898305" calcext:value-type="float">
            <text:p>2.6</text:p>
          </table:table-cell>
          <table:table-cell table:style-name="ce40" table:formula="of:=+[.$K$68]-[.C76]" office:value-type="float" office:value="3.0675593220339" calcext:value-type="float">
            <text:p>3.1</text:p>
          </table:table-cell>
          <table:table-cell table:style-name="ce40" table:formula="of:=+[.$L$68]-[.C76]" office:value-type="float" office:value="3.50789830508475" calcext:value-type="float">
            <text:p>3.5</text:p>
          </table:table-cell>
          <table:table-cell table:style-name="ce40" table:formula="of:=+[.$M$68]-[.C76]" office:value-type="float" office:value="3.94823728813559" calcext:value-type="float">
            <text:p>3.9</text:p>
          </table:table-cell>
          <table:table-cell table:style-name="ce40" table:formula="of:=+[.$N$68]-[.C76]" office:value-type="float" office:value="4.38857627118644" calcext:value-type="float">
            <text:p>4.4</text:p>
          </table:table-cell>
          <table:table-cell table:style-name="ce40" table:formula="of:=+[.$O$68]-[.C76]" office:value-type="float" office:value="4.82891525423729" calcext:value-type="float">
            <text:p>4.8</text:p>
          </table:table-cell>
          <table:table-cell table:number-columns-repeated="5"/>
          <table:table-cell table:style-name="ce99" table:formula="of:=+[.$U$68]-[.S76]" office:value-type="float" office:value="1.77509951177717" calcext:value-type="float">
            <text:p>1.8</text:p>
          </table:table-cell>
          <table:table-cell table:style-name="ce99" table:formula="of:=+[.$V$68]-[.S76]" office:value-type="float" office:value="2.21693002025175" calcext:value-type="float">
            <text:p>2.2</text:p>
          </table:table-cell>
          <table:table-cell table:style-name="ce99" table:formula="of:=+[.$W$68]-[.S76]" office:value-type="float" office:value="2.65876052872633" calcext:value-type="float">
            <text:p>2.7</text:p>
          </table:table-cell>
          <table:table-cell table:style-name="ce99" table:formula="of:=+[.$X$68]-[.S76]" office:value-type="float" office:value="3.38490036399082" calcext:value-type="float">
            <text:p>3.4</text:p>
          </table:table-cell>
          <table:table-cell table:style-name="ce99" table:formula="of:=+[.$Y$68]-[.S76]" office:value-type="float" office:value="3.82673087246539" calcext:value-type="float">
            <text:p>3.8</text:p>
          </table:table-cell>
          <table:table-cell table:number-columns-repeated="16359"/>
        </table:table-row>
        <table:table-row table:style-name="ro1">
          <table:table-cell table:number-columns-repeated="4"/>
          <table:table-cell table:style-name="ce41" table:formula="of:=+[.$E$68]-[.C77]" office:value-type="float" office:value="0.148275207924351" calcext:value-type="float">
            <text:p>0.1</text:p>
          </table:table-cell>
          <table:table-cell table:style-name="ce41" table:formula="of:=+[.$F$68]-[.C77]" office:value-type="float" office:value="0.5886141909752" calcext:value-type="float">
            <text:p>0.6</text:p>
          </table:table-cell>
          <table:table-cell table:style-name="ce41" table:formula="of:=+[.$G$68]-[.C77]" office:value-type="float" office:value="1.02895317402605" calcext:value-type="float">
            <text:p>1.0</text:p>
          </table:table-cell>
          <table:table-cell table:style-name="ce41" table:formula="of:=+[.$H$68]-[.C77]" office:value-type="float" office:value="1.42418644067797" calcext:value-type="float">
            <text:p>1.4</text:p>
          </table:table-cell>
          <table:table-cell table:style-name="ce40" table:formula="of:=+[.$I$68]-[.C77]" office:value-type="float" office:value="1.86452542372881" calcext:value-type="float">
            <text:p>1.9</text:p>
          </table:table-cell>
          <table:table-cell table:style-name="ce40" table:formula="of:=+[.$J$68]-[.C77]" office:value-type="float" office:value="2.30486440677966" calcext:value-type="float">
            <text:p>2.3</text:p>
          </table:table-cell>
          <table:table-cell table:style-name="ce40" table:formula="of:=+[.$K$68]-[.C77]" office:value-type="float" office:value="2.74520338983051" calcext:value-type="float">
            <text:p>2.7</text:p>
          </table:table-cell>
          <table:table-cell table:style-name="ce40" table:formula="of:=+[.$L$68]-[.C77]" office:value-type="float" office:value="3.18554237288136" calcext:value-type="float">
            <text:p>3.2</text:p>
          </table:table-cell>
          <table:table-cell table:style-name="ce40" table:formula="of:=+[.$M$68]-[.C77]" office:value-type="float" office:value="3.6258813559322" calcext:value-type="float">
            <text:p>3.6</text:p>
          </table:table-cell>
          <table:table-cell table:style-name="ce40" table:formula="of:=+[.$N$68]-[.C77]" office:value-type="float" office:value="4.06622033898305" calcext:value-type="float">
            <text:p>4.1</text:p>
          </table:table-cell>
          <table:table-cell table:style-name="ce40" table:formula="of:=+[.$O$68]-[.C77]" office:value-type="float" office:value="4.5065593220339" calcext:value-type="float">
            <text:p>4.5</text:p>
          </table:table-cell>
          <table:table-cell table:number-columns-repeated="5"/>
          <table:table-cell table:style-name="ce99" table:formula="of:=+[.$U$68]-[.S77]" office:value-type="float" office:value="1.51443792212624" calcext:value-type="float">
            <text:p>1.5</text:p>
          </table:table-cell>
          <table:table-cell table:style-name="ce99" table:formula="of:=+[.$V$68]-[.S77]" office:value-type="float" office:value="1.95626843060081" calcext:value-type="float">
            <text:p>2.0</text:p>
          </table:table-cell>
          <table:table-cell table:style-name="ce99" table:formula="of:=+[.$W$68]-[.S77]" office:value-type="float" office:value="2.39809893907539" calcext:value-type="float">
            <text:p>2.4</text:p>
          </table:table-cell>
          <table:table-cell table:style-name="ce99" table:formula="of:=+[.$X$68]-[.S77]" office:value-type="float" office:value="3.12423877433988" calcext:value-type="float">
            <text:p>3.1</text:p>
          </table:table-cell>
          <table:table-cell table:style-name="ce99" table:formula="of:=+[.$Y$68]-[.S77]" office:value-type="float" office:value="3.56606928281445" calcext:value-type="float">
            <text:p>3.6</text:p>
          </table:table-cell>
          <table:table-cell table:number-columns-repeated="16359"/>
        </table:table-row>
        <table:table-row table:style-name="ro1">
          <table:table-cell table:number-columns-repeated="4"/>
          <table:table-cell table:style-name="ce41" table:formula="of:=+[.$E$68]-[.C78]" office:value-type="float" office:value="-0.174080724279039" calcext:value-type="float">
            <text:p>-0.2</text:p>
          </table:table-cell>
          <table:table-cell table:style-name="ce41" table:formula="of:=+[.$F$68]-[.C78]" office:value-type="float" office:value="0.26625825877181" calcext:value-type="float">
            <text:p>0.3</text:p>
          </table:table-cell>
          <table:table-cell table:style-name="ce41" table:formula="of:=+[.$G$68]-[.C78]" office:value-type="float" office:value="0.706597241822658" calcext:value-type="float">
            <text:p>0.7</text:p>
          </table:table-cell>
          <table:table-cell table:style-name="ce41" table:formula="of:=+[.$H$68]-[.C78]" office:value-type="float" office:value="1.10183050847458" calcext:value-type="float">
            <text:p>1.1</text:p>
          </table:table-cell>
          <table:table-cell table:style-name="ce41" table:formula="of:=+[.$I$68]-[.C78]" office:value-type="float" office:value="1.54216949152542" calcext:value-type="float">
            <text:p>1.5</text:p>
          </table:table-cell>
          <table:table-cell table:style-name="ce40" table:formula="of:=+[.$J$68]-[.C78]" office:value-type="float" office:value="1.98250847457627" calcext:value-type="float">
            <text:p>2.0</text:p>
          </table:table-cell>
          <table:table-cell table:style-name="ce40" table:formula="of:=+[.$K$68]-[.C78]" office:value-type="float" office:value="2.42284745762712" calcext:value-type="float">
            <text:p>2.4</text:p>
          </table:table-cell>
          <table:table-cell table:style-name="ce40" table:formula="of:=+[.$L$68]-[.C78]" office:value-type="float" office:value="2.86318644067797" calcext:value-type="float">
            <text:p>2.9</text:p>
          </table:table-cell>
          <table:table-cell table:style-name="ce40" table:formula="of:=+[.$M$68]-[.C78]" office:value-type="float" office:value="3.30352542372881" calcext:value-type="float">
            <text:p>3.3</text:p>
          </table:table-cell>
          <table:table-cell table:style-name="ce40" table:formula="of:=+[.$N$68]-[.C78]" office:value-type="float" office:value="3.74386440677966" calcext:value-type="float">
            <text:p>3.7</text:p>
          </table:table-cell>
          <table:table-cell table:style-name="ce40" table:formula="of:=+[.$O$68]-[.C78]" office:value-type="float" office:value="4.18420338983051" calcext:value-type="float">
            <text:p>4.2</text:p>
          </table:table-cell>
          <table:table-cell table:number-columns-repeated="5"/>
          <table:table-cell table:style-name="ce99" table:formula="of:=+[.$U$68]-[.S78]" office:value-type="float" office:value="1.25377633247529" calcext:value-type="float">
            <text:p>1.3</text:p>
          </table:table-cell>
          <table:table-cell table:style-name="ce99" table:formula="of:=+[.$V$68]-[.S78]" office:value-type="float" office:value="1.69560684094987" calcext:value-type="float">
            <text:p>1.7</text:p>
          </table:table-cell>
          <table:table-cell table:style-name="ce99" table:formula="of:=+[.$W$68]-[.S78]" office:value-type="float" office:value="2.13743734942445" calcext:value-type="float">
            <text:p>2.1</text:p>
          </table:table-cell>
          <table:table-cell table:style-name="ce99" table:formula="of:=+[.$X$68]-[.S78]" office:value-type="float" office:value="2.86357718468894" calcext:value-type="float">
            <text:p>2.9</text:p>
          </table:table-cell>
          <table:table-cell table:style-name="ce99" table:formula="of:=+[.$Y$68]-[.S78]" office:value-type="float" office:value="3.30540769316351" calcext:value-type="float">
            <text:p>3.3</text:p>
          </table:table-cell>
          <table:table-cell table:number-columns-repeated="16359"/>
        </table:table-row>
        <table:table-row table:style-name="ro1">
          <table:table-cell table:number-columns-repeated="4"/>
          <table:table-cell table:style-name="ce41" table:formula="of:=+[.$E$68]-[.C79]" office:value-type="float" office:value="-0.456342269132923" calcext:value-type="float">
            <text:p>-0.5</text:p>
          </table:table-cell>
          <table:table-cell table:style-name="ce41" table:formula="of:=+[.$F$68]-[.C79]" office:value-type="float" office:value="-0.0160032860820749" calcext:value-type="float">
            <text:p>0.0</text:p>
          </table:table-cell>
          <table:table-cell table:style-name="ce41" table:formula="of:=+[.$G$68]-[.C79]" office:value-type="float" office:value="0.424335696968774" calcext:value-type="float">
            <text:p>0.4</text:p>
          </table:table-cell>
          <table:table-cell table:style-name="ce41" table:formula="of:=+[.$H$68]-[.C79]" office:value-type="float" office:value="0.819568963620691" calcext:value-type="float">
            <text:p>0.8</text:p>
          </table:table-cell>
          <table:table-cell table:style-name="ce41" table:formula="of:=+[.$I$68]-[.C79]" office:value-type="float" office:value="1.25990794667154" calcext:value-type="float">
            <text:p>1.3</text:p>
          </table:table-cell>
          <table:table-cell table:style-name="ce40" table:formula="of:=+[.$J$68]-[.C79]" office:value-type="float" office:value="1.70024692972239" calcext:value-type="float">
            <text:p>1.7</text:p>
          </table:table-cell>
          <table:table-cell table:style-name="ce40" table:formula="of:=+[.$K$68]-[.C79]" office:value-type="float" office:value="2.14058591277323" calcext:value-type="float">
            <text:p>2.1</text:p>
          </table:table-cell>
          <table:table-cell table:style-name="ce40" table:formula="of:=+[.$L$68]-[.C79]" office:value-type="float" office:value="2.58092489582408" calcext:value-type="float">
            <text:p>2.6</text:p>
          </table:table-cell>
          <table:table-cell table:style-name="ce40" table:formula="of:=+[.$M$68]-[.C79]" office:value-type="float" office:value="3.02126387887493" calcext:value-type="float">
            <text:p>3.0</text:p>
          </table:table-cell>
          <table:table-cell table:style-name="ce40" table:formula="of:=+[.$N$68]-[.C79]" office:value-type="float" office:value="3.46160286192577" calcext:value-type="float">
            <text:p>3.5</text:p>
          </table:table-cell>
          <table:table-cell table:style-name="ce40" table:formula="of:=+[.$O$68]-[.C79]" office:value-type="float" office:value="3.90194184497662" calcext:value-type="float">
            <text:p>3.9</text:p>
          </table:table-cell>
          <table:table-cell table:number-columns-repeated="5"/>
          <table:table-cell table:style-name="ce99" table:formula="of:=+[.$U$68]-[.S79]" office:value-type="float" office:value="0.993114742824356" calcext:value-type="float">
            <text:p>1.0</text:p>
          </table:table-cell>
          <table:table-cell table:style-name="ce99" table:formula="of:=+[.$V$68]-[.S79]" office:value-type="float" office:value="1.43494525129893" calcext:value-type="float">
            <text:p>1.4</text:p>
          </table:table-cell>
          <table:table-cell table:style-name="ce99" table:formula="of:=+[.$W$68]-[.S79]" office:value-type="float" office:value="1.87677575977351" calcext:value-type="float">
            <text:p>1.9</text:p>
          </table:table-cell>
          <table:table-cell table:style-name="ce99" table:formula="of:=+[.$X$68]-[.S79]" office:value-type="float" office:value="2.602915595038" calcext:value-type="float">
            <text:p>2.6</text:p>
          </table:table-cell>
          <table:table-cell table:style-name="ce99" table:formula="of:=+[.$Y$68]-[.S79]" office:value-type="float" office:value="3.04474610351258" calcext:value-type="float">
            <text:p>3.0</text:p>
          </table:table-cell>
          <table:table-cell table:number-columns-repeated="16359"/>
        </table:table-row>
        <table:table-row table:style-name="ro1">
          <table:table-cell table:number-columns-repeated="4"/>
          <table:table-cell table:style-name="ce41" table:formula="of:=+[.$E$68]-[.C80]" office:value-type="float" office:value="-0.778698201336312" calcext:value-type="float">
            <text:p>-0.8</text:p>
          </table:table-cell>
          <table:table-cell table:style-name="ce41" table:formula="of:=+[.$F$68]-[.C80]" office:value-type="float" office:value="-0.338359218285463" calcext:value-type="float">
            <text:p>-0.3</text:p>
          </table:table-cell>
          <table:table-cell table:style-name="ce41" table:formula="of:=+[.$G$68]-[.C80]" office:value-type="float" office:value="0.101979764765385" calcext:value-type="float">
            <text:p>0.1</text:p>
          </table:table-cell>
          <table:table-cell table:style-name="ce41" table:formula="of:=+[.$H$68]-[.C80]" office:value-type="float" office:value="0.497213031417303" calcext:value-type="float">
            <text:p>0.5</text:p>
          </table:table-cell>
          <table:table-cell table:style-name="ce41" table:formula="of:=+[.$I$68]-[.C80]" office:value-type="float" office:value="0.93755201446815" calcext:value-type="float">
            <text:p>0.9</text:p>
          </table:table-cell>
          <table:table-cell table:style-name="ce41" table:formula="of:=+[.$J$68]-[.C80]" office:value-type="float" office:value="1.377890997519" calcext:value-type="float">
            <text:p>1.4</text:p>
          </table:table-cell>
          <table:table-cell table:style-name="ce40" table:formula="of:=+[.$K$68]-[.C80]" office:value-type="float" office:value="1.81822998056985" calcext:value-type="float">
            <text:p>1.8</text:p>
          </table:table-cell>
          <table:table-cell table:style-name="ce40" table:formula="of:=+[.$L$68]-[.C80]" office:value-type="float" office:value="2.25856896362069" calcext:value-type="float">
            <text:p>2.3</text:p>
          </table:table-cell>
          <table:table-cell table:style-name="ce40" table:formula="of:=+[.$M$68]-[.C80]" office:value-type="float" office:value="2.69890794667154" calcext:value-type="float">
            <text:p>2.7</text:p>
          </table:table-cell>
          <table:table-cell table:style-name="ce40" table:formula="of:=+[.$N$68]-[.C80]" office:value-type="float" office:value="3.13924692972239" calcext:value-type="float">
            <text:p>3.1</text:p>
          </table:table-cell>
          <table:table-cell table:style-name="ce40" table:formula="of:=+[.$O$68]-[.C80]" office:value-type="float" office:value="3.57958591277323" calcext:value-type="float">
            <text:p>3.6</text:p>
          </table:table-cell>
          <table:table-cell table:number-columns-repeated="5"/>
          <table:table-cell table:style-name="ce99" table:formula="of:=+[.$U$68]-[.S80]" office:value-type="float" office:value="0.732453153173416" calcext:value-type="float">
            <text:p>0.7</text:p>
          </table:table-cell>
          <table:table-cell table:style-name="ce99" table:formula="of:=+[.$V$68]-[.S80]" office:value-type="float" office:value="1.17428366164799" calcext:value-type="float">
            <text:p>1.2</text:p>
          </table:table-cell>
          <table:table-cell table:style-name="ce99" table:formula="of:=+[.$W$68]-[.S80]" office:value-type="float" office:value="1.61611417012257" calcext:value-type="float">
            <text:p>1.6</text:p>
          </table:table-cell>
          <table:table-cell table:style-name="ce99" table:formula="of:=+[.$X$68]-[.S80]" office:value-type="float" office:value="2.34225400538706" calcext:value-type="float">
            <text:p>2.3</text:p>
          </table:table-cell>
          <table:table-cell table:style-name="ce99" table:formula="of:=+[.$Y$68]-[.S80]" office:value-type="float" office:value="2.78408451386164" calcext:value-type="float">
            <text:p>2.8</text:p>
          </table:table-cell>
          <table:table-cell table:number-columns-repeated="16359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Análisis de sensibilidad'.U84:'Análisis de sensibilidad'.Y94">
            <calcext:condition calcext:apply-style-name="ConditionalStyle_1" calcext:value="&lt;0" calcext:base-cell-address="'Análisis de sensibilidad'.U84"/>
          </calcext:conditional-format>
          <calcext:conditional-format calcext:target-range-address="'Análisis de sensibilidad'.AJ70:'Análisis de sensibilidad'.AT80">
            <calcext:condition calcext:apply-style-name="ConditionalStyle_2" calcext:value="&lt;0" calcext:base-cell-address="'Análisis de sensibilidad'.AJ70"/>
          </calcext:conditional-format>
          <calcext:conditional-format calcext:target-range-address="'Análisis de sensibilidad'.U70:'Análisis de sensibilidad'.AE80">
            <calcext:condition calcext:apply-style-name="ConditionalStyle_3" calcext:value="&lt;0" calcext:base-cell-address="'Análisis de sensibilidad'.U70"/>
          </calcext:conditional-format>
          <calcext:conditional-format calcext:target-range-address="'Análisis de sensibilidad'.E70:'Análisis de sensibilidad'.O80">
            <calcext:condition calcext:apply-style-name="ConditionalStyle_4" calcext:value="&lt;0" calcext:base-cell-address="'Análisis de sensibilidad'.E70"/>
          </calcext:conditional-format>
          <calcext:conditional-format calcext:target-range-address="'Análisis de sensibilidad'.H52:'Análisis de sensibilidad'.H62">
            <calcext:condition calcext:apply-style-name="ConditionalStyle_5" calcext:value="&lt;0" calcext:base-cell-address="'Análisis de sensibilidad'.H52"/>
          </calcext:conditional-format>
          <calcext:conditional-format calcext:target-range-address="'Análisis de sensibilidad'.F52:'Análisis de sensibilidad'.F62">
            <calcext:condition calcext:apply-style-name="ConditionalStyle_6" calcext:value="&lt;0" calcext:base-cell-address="'Análisis de sensibilidad'.F52"/>
          </calcext:conditional-format>
          <calcext:conditional-format calcext:target-range-address="'Análisis de sensibilidad'.X37:'Análisis de sensibilidad'.X47">
            <calcext:condition calcext:apply-style-name="ConditionalStyle_7" calcext:value="&lt;0" calcext:base-cell-address="'Análisis de sensibilidad'.X37"/>
          </calcext:conditional-format>
          <calcext:conditional-format calcext:target-range-address="'Análisis de sensibilidad'.V37:'Análisis de sensibilidad'.V47">
            <calcext:condition calcext:apply-style-name="ConditionalStyle_8" calcext:value="&lt;0" calcext:base-cell-address="'Análisis de sensibilidad'.V37"/>
          </calcext:conditional-format>
          <calcext:conditional-format calcext:target-range-address="'Análisis de sensibilidad'.O37:'Análisis de sensibilidad'.O47">
            <calcext:condition calcext:apply-style-name="ConditionalStyle_9" calcext:value="&lt;0" calcext:base-cell-address="'Análisis de sensibilidad'.O37"/>
          </calcext:conditional-format>
          <calcext:conditional-format calcext:target-range-address="'Análisis de sensibilidad'.M37:'Análisis de sensibilidad'.M47">
            <calcext:condition calcext:apply-style-name="ConditionalStyle_10" calcext:value="&lt;0" calcext:base-cell-address="'Análisis de sensibilidad'.M37"/>
          </calcext:conditional-format>
          <calcext:conditional-format calcext:target-range-address="'Análisis de sensibilidad'.H37:'Análisis de sensibilidad'.H47">
            <calcext:condition calcext:apply-style-name="ConditionalStyle_11" calcext:value="&lt;0" calcext:base-cell-address="'Análisis de sensibilidad'.H37"/>
          </calcext:conditional-format>
          <calcext:conditional-format calcext:target-range-address="'Análisis de sensibilidad'.F37:'Análisis de sensibilidad'.F47">
            <calcext:condition calcext:apply-style-name="ConditionalStyle_12" calcext:value="&lt;0" calcext:base-cell-address="'Análisis de sensibilidad'.F37"/>
          </calcext:conditional-format>
          <calcext:conditional-format calcext:target-range-address="'Análisis de sensibilidad'.X21:'Análisis de sensibilidad'.X31">
            <calcext:condition calcext:apply-style-name="ConditionalStyle_13" calcext:value="&lt;0" calcext:base-cell-address="'Análisis de sensibilidad'.X21"/>
          </calcext:conditional-format>
          <calcext:conditional-format calcext:target-range-address="'Análisis de sensibilidad'.V21:'Análisis de sensibilidad'.V31">
            <calcext:condition calcext:apply-style-name="ConditionalStyle_14" calcext:value="&lt;0" calcext:base-cell-address="'Análisis de sensibilidad'.V21"/>
          </calcext:conditional-format>
          <calcext:conditional-format calcext:target-range-address="'Análisis de sensibilidad'.O21:'Análisis de sensibilidad'.O31">
            <calcext:condition calcext:apply-style-name="ConditionalStyle_15" calcext:value="&lt;0" calcext:base-cell-address="'Análisis de sensibilidad'.O21"/>
          </calcext:conditional-format>
          <calcext:conditional-format calcext:target-range-address="'Análisis de sensibilidad'.M21:'Análisis de sensibilidad'.M31">
            <calcext:condition calcext:apply-style-name="ConditionalStyle_16" calcext:value="&lt;0" calcext:base-cell-address="'Análisis de sensibilidad'.M21"/>
          </calcext:conditional-format>
          <calcext:conditional-format calcext:target-range-address="'Análisis de sensibilidad'.H21:'Análisis de sensibilidad'.H31">
            <calcext:condition calcext:apply-style-name="ConditionalStyle_17" calcext:value="&lt;0" calcext:base-cell-address="'Análisis de sensibilidad'.H21"/>
          </calcext:conditional-format>
          <calcext:conditional-format calcext:target-range-address="'Análisis de sensibilidad'.F21:'Análisis de sensibilidad'.F31">
            <calcext:condition calcext:apply-style-name="ConditionalStyle_18" calcext:value="&lt;0" calcext:base-cell-address="'Análisis de sensibilidad'.F21"/>
          </calcext:conditional-format>
        </calcext:conditional-formats>
      </table:table>
      <table:table table:name="Probable" table:style-name="ta3">
        <table:scenario table:display-border="false" table:border-color="#c0c0c0" table:copy-back="false" table:copy-styles="false" table:copy-formulas="false" table:protected="true" table:is-active="false" table:scenario-ranges="Probable.F6:Probable.F11" table:comment="Creado por ASUS el 23/02/2021&#10;Modificado por ASUS el 23/02/2021&#10;Modificado por ASUS el 25/02/2021"/>
        <table:table-column table:style-name="co4" table:default-cell-style-name="ce110"/>
        <table:table-column table:style-name="co5" table:default-cell-style-name="ce110"/>
        <table:table-column table:style-name="co6" table:default-cell-style-name="ce110"/>
        <table:table-column table:style-name="co7" table:default-cell-style-name="ce110"/>
        <table:table-column table:style-name="co8" table:number-columns-repeated="11" table:default-cell-style-name="ce110"/>
        <table:table-column table:style-name="co9" table:default-cell-style-name="ce110"/>
        <table:table-column table:style-name="co10" table:default-cell-style-name="ce110"/>
        <table:table-column table:style-name="co5" table:default-cell-style-name="ce110"/>
        <table:table-column table:style-name="co11" table:default-cell-style-name="ce110"/>
        <table:table-column table:style-name="co4" table:default-cell-style-name="ce110"/>
        <table:table-column table:style-name="co12" table:number-columns-repeated="3" table:default-cell-style-name="ce110"/>
        <table:table-column table:style-name="co13" table:default-cell-style-name="ce110"/>
        <table:table-column table:style-name="co12" table:number-columns-repeated="7" table:default-cell-style-name="ce110"/>
        <table:table-column table:style-name="co4" table:default-cell-style-name="ce110"/>
        <table:table-column table:style-name="co14" table:default-cell-style-name="ce110"/>
        <table:table-column table:style-name="co15" table:default-cell-style-name="ce110"/>
        <table:table-column table:style-name="co4" table:number-columns-repeated="16350" table:default-cell-style-name="ce110"/>
        <table:table-row table:style-name="ro5" table:number-rows-repeated="5">
          <table:table-cell table:number-columns-repeated="16384"/>
        </table:table-row>
        <table:table-row table:style-name="ro5">
          <table:table-cell table:number-columns-repeated="5"/>
          <table:table-cell table:style-name="ce43" office:value-type="percentage" office:value="0" calcext:value-type="percentage">
            <text:p>0 %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43" office:value-type="percentage" office:value="0" calcext:value-type="percentage">
            <text:p>0 %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12" office:value-type="percentage" office:value="0" calcext:value-type="percentage">
            <text:p>0 %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43" office:value-type="percentage" office:value="0" calcext:value-type="percentage">
            <text:p>0 %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43" office:value-type="percentage" office:value="0" calcext:value-type="percentage">
            <text:p>0 %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43" office:value-type="percentage" office:value="0" calcext:value-type="percentage">
            <text:p>0 %</text:p>
          </table:table-cell>
          <table:table-cell table:number-columns-repeated="16378"/>
        </table:table-row>
        <table:table-row table:style-name="ro1" table:number-rows-repeated="9">
          <table:table-cell table:number-columns-repeated="16384"/>
        </table:table-row>
        <table:table-row table:style-name="ro1" table:number-rows-repeated="11">
          <table:table-cell table:number-columns-repeated="5"/>
          <table:table-cell table:style-name="ce113"/>
          <table:table-cell/>
          <table:table-cell table:style-name="ce116"/>
          <table:table-cell table:number-columns-repeated="4"/>
          <table:table-cell table:style-name="ce119"/>
          <table:table-cell/>
          <table:table-cell table:style-name="ce121"/>
          <table:table-cell table:number-columns-repeated="6"/>
          <table:table-cell table:style-name="ce125"/>
          <table:table-cell/>
          <table:table-cell table:style-name="ce127"/>
          <table:table-cell table:number-columns-repeated="16360"/>
        </table:table-row>
        <table:table-row table:style-name="ro1" table:number-rows-repeated="5">
          <table:table-cell table:number-columns-repeated="16384"/>
        </table:table-row>
        <table:table-row table:style-name="ro1" table:number-rows-repeated="11">
          <table:table-cell table:number-columns-repeated="5"/>
          <table:table-cell table:style-name="ce114"/>
          <table:table-cell/>
          <table:table-cell table:style-name="ce117"/>
          <table:table-cell table:number-columns-repeated="4"/>
          <table:table-cell table:style-name="ce120"/>
          <table:table-cell/>
          <table:table-cell table:style-name="ce122"/>
          <table:table-cell table:number-columns-repeated="6"/>
          <table:table-cell table:style-name="ce126"/>
          <table:table-cell/>
          <table:table-cell table:style-name="ce128"/>
          <table:table-cell table:number-columns-repeated="16360"/>
        </table:table-row>
        <table:table-row table:style-name="ro1" table:number-rows-repeated="4">
          <table:table-cell table:number-columns-repeated="16384"/>
        </table:table-row>
        <table:table-row table:style-name="ro1" table:number-rows-repeated="11">
          <table:table-cell table:number-columns-repeated="5"/>
          <table:table-cell table:style-name="ce115"/>
          <table:table-cell/>
          <table:table-cell table:style-name="ce118"/>
          <table:table-cell table:number-columns-repeated="16376"/>
        </table:table-row>
        <table:table-row table:style-name="ro1" table:number-rows-repeated="7">
          <table:table-cell table:number-columns-repeated="16384"/>
        </table:table-row>
        <table:table-row table:style-name="ro1" table:number-rows-repeated="4">
          <table:table-cell table:number-columns-repeated="4"/>
          <table:table-cell table:style-name="ce111" table:number-columns-repeated="11"/>
          <table:table-cell table:number-columns-repeated="5"/>
          <table:table-cell table:style-name="ce123" table:number-columns-repeated="11"/>
          <table:table-cell table:number-columns-repeated="4"/>
          <table:table-cell table:style-name="ce129" table:number-columns-repeated="11"/>
          <table:table-cell table:number-columns-repeated="16338"/>
        </table:table-row>
        <table:table-row table:style-name="ro4">
          <table:table-cell table:number-columns-repeated="4"/>
          <table:table-cell table:style-name="ce111" table:number-columns-repeated="11"/>
          <table:table-cell table:number-columns-repeated="5"/>
          <table:table-cell table:style-name="ce123" table:number-columns-repeated="11"/>
          <table:table-cell table:number-columns-repeated="4"/>
          <table:table-cell table:style-name="ce129" table:number-columns-repeated="11"/>
          <table:table-cell table:number-columns-repeated="16338"/>
        </table:table-row>
        <table:table-row table:style-name="ro1" table:number-rows-repeated="6">
          <table:table-cell table:number-columns-repeated="4"/>
          <table:table-cell table:style-name="ce111" table:number-columns-repeated="11"/>
          <table:table-cell table:number-columns-repeated="5"/>
          <table:table-cell table:style-name="ce123" table:number-columns-repeated="11"/>
          <table:table-cell table:number-columns-repeated="4"/>
          <table:table-cell table:style-name="ce129" table:number-columns-repeated="11"/>
          <table:table-cell table:number-columns-repeated="16338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11">
          <table:table-cell table:number-columns-repeated="20"/>
          <table:table-cell table:style-name="ce124" table:number-columns-repeated="5"/>
          <table:table-cell table:number-columns-repeated="16359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Probable.U84:Probable.Y94">
            <calcext:condition calcext:apply-style-name="ConditionalStyle_1" calcext:value="&lt;0" calcext:base-cell-address="Probable.U84"/>
          </calcext:conditional-format>
          <calcext:conditional-format calcext:target-range-address="Probable.AJ70:Probable.AT80">
            <calcext:condition calcext:apply-style-name="ConditionalStyle_2" calcext:value="&lt;0" calcext:base-cell-address="Probable.AJ70"/>
          </calcext:conditional-format>
          <calcext:conditional-format calcext:target-range-address="Probable.U70:Probable.AE80">
            <calcext:condition calcext:apply-style-name="ConditionalStyle_3" calcext:value="&lt;0" calcext:base-cell-address="Probable.U70"/>
          </calcext:conditional-format>
          <calcext:conditional-format calcext:target-range-address="Probable.E70:Probable.O80">
            <calcext:condition calcext:apply-style-name="ConditionalStyle_4" calcext:value="&lt;0" calcext:base-cell-address="Probable.E70"/>
          </calcext:conditional-format>
          <calcext:conditional-format calcext:target-range-address="Probable.H52:Probable.H62">
            <calcext:condition calcext:apply-style-name="ConditionalStyle_5" calcext:value="&lt;0" calcext:base-cell-address="Probable.H52"/>
          </calcext:conditional-format>
          <calcext:conditional-format calcext:target-range-address="Probable.F52:Probable.F62">
            <calcext:condition calcext:apply-style-name="ConditionalStyle_6" calcext:value="&lt;0" calcext:base-cell-address="Probable.F52"/>
          </calcext:conditional-format>
          <calcext:conditional-format calcext:target-range-address="Probable.X37:Probable.X47">
            <calcext:condition calcext:apply-style-name="ConditionalStyle_7" calcext:value="&lt;0" calcext:base-cell-address="Probable.X37"/>
          </calcext:conditional-format>
          <calcext:conditional-format calcext:target-range-address="Probable.V37:Probable.V47">
            <calcext:condition calcext:apply-style-name="ConditionalStyle_8" calcext:value="&lt;0" calcext:base-cell-address="Probable.V37"/>
          </calcext:conditional-format>
          <calcext:conditional-format calcext:target-range-address="Probable.O37:Probable.O47">
            <calcext:condition calcext:apply-style-name="ConditionalStyle_9" calcext:value="&lt;0" calcext:base-cell-address="Probable.O37"/>
          </calcext:conditional-format>
          <calcext:conditional-format calcext:target-range-address="Probable.M37:Probable.M47">
            <calcext:condition calcext:apply-style-name="ConditionalStyle_10" calcext:value="&lt;0" calcext:base-cell-address="Probable.M37"/>
          </calcext:conditional-format>
          <calcext:conditional-format calcext:target-range-address="Probable.H37:Probable.H47">
            <calcext:condition calcext:apply-style-name="ConditionalStyle_11" calcext:value="&lt;0" calcext:base-cell-address="Probable.H37"/>
          </calcext:conditional-format>
          <calcext:conditional-format calcext:target-range-address="Probable.F37:Probable.F47">
            <calcext:condition calcext:apply-style-name="ConditionalStyle_12" calcext:value="&lt;0" calcext:base-cell-address="Probable.F37"/>
          </calcext:conditional-format>
          <calcext:conditional-format calcext:target-range-address="Probable.X21:Probable.X31">
            <calcext:condition calcext:apply-style-name="ConditionalStyle_13" calcext:value="&lt;0" calcext:base-cell-address="Probable.X21"/>
          </calcext:conditional-format>
          <calcext:conditional-format calcext:target-range-address="Probable.V21:Probable.V31">
            <calcext:condition calcext:apply-style-name="ConditionalStyle_14" calcext:value="&lt;0" calcext:base-cell-address="Probable.V21"/>
          </calcext:conditional-format>
          <calcext:conditional-format calcext:target-range-address="Probable.O21:Probable.O31">
            <calcext:condition calcext:apply-style-name="ConditionalStyle_15" calcext:value="&lt;0" calcext:base-cell-address="Probable.O21"/>
          </calcext:conditional-format>
          <calcext:conditional-format calcext:target-range-address="Probable.M21:Probable.M31">
            <calcext:condition calcext:apply-style-name="ConditionalStyle_16" calcext:value="&lt;0" calcext:base-cell-address="Probable.M21"/>
          </calcext:conditional-format>
          <calcext:conditional-format calcext:target-range-address="Probable.H21:Probable.H31">
            <calcext:condition calcext:apply-style-name="ConditionalStyle_17" calcext:value="&lt;0" calcext:base-cell-address="Probable.H21"/>
          </calcext:conditional-format>
          <calcext:conditional-format calcext:target-range-address="Probable.F21:Probable.F31">
            <calcext:condition calcext:apply-style-name="ConditionalStyle_18" calcext:value="&lt;0" calcext:base-cell-address="Probable.F21"/>
          </calcext:conditional-format>
        </calcext:conditional-formats>
      </table:table>
      <table:table table:name="Pesimista" table:style-name="ta3">
        <table:scenario table:display-border="false" table:border-color="#c0c0c0" table:copy-back="false" table:copy-styles="false" table:copy-formulas="false" table:protected="true" table:is-active="false" table:scenario-ranges="Pesimista.F6:Pesimista.F11" table:comment="Creado por ASUS el 23/02/2021&#10;Modificado por ASUS el 23/02/2021&#10;Modificado por ASUS el 25/02/2021"/>
        <table:table-column table:style-name="co4" table:default-cell-style-name="ce110"/>
        <table:table-column table:style-name="co5" table:default-cell-style-name="ce110"/>
        <table:table-column table:style-name="co6" table:default-cell-style-name="ce110"/>
        <table:table-column table:style-name="co7" table:default-cell-style-name="ce110"/>
        <table:table-column table:style-name="co8" table:number-columns-repeated="11" table:default-cell-style-name="ce110"/>
        <table:table-column table:style-name="co9" table:default-cell-style-name="ce110"/>
        <table:table-column table:style-name="co10" table:default-cell-style-name="ce110"/>
        <table:table-column table:style-name="co5" table:default-cell-style-name="ce110"/>
        <table:table-column table:style-name="co11" table:default-cell-style-name="ce110"/>
        <table:table-column table:style-name="co4" table:default-cell-style-name="ce110"/>
        <table:table-column table:style-name="co12" table:number-columns-repeated="3" table:default-cell-style-name="ce110"/>
        <table:table-column table:style-name="co13" table:default-cell-style-name="ce110"/>
        <table:table-column table:style-name="co12" table:number-columns-repeated="7" table:default-cell-style-name="ce110"/>
        <table:table-column table:style-name="co4" table:default-cell-style-name="ce110"/>
        <table:table-column table:style-name="co14" table:default-cell-style-name="ce110"/>
        <table:table-column table:style-name="co15" table:default-cell-style-name="ce110"/>
        <table:table-column table:style-name="co4" table:number-columns-repeated="16350" table:default-cell-style-name="ce110"/>
        <table:table-row table:style-name="ro5" table:number-rows-repeated="5">
          <table:table-cell table:number-columns-repeated="16384"/>
        </table:table-row>
        <table:table-row table:style-name="ro5">
          <table:table-cell table:number-columns-repeated="5"/>
          <table:table-cell table:style-name="ce43" office:value-type="percentage" office:value="-0.1" calcext:value-type="percentage">
            <text:p>-10 %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43" office:value-type="percentage" office:value="-0.12" calcext:value-type="percentage">
            <text:p>-12 %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12" office:value-type="percentage" office:value="-0.2" calcext:value-type="percentage">
            <text:p>-20 %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43" office:value-type="percentage" office:value="0.15" calcext:value-type="percentage">
            <text:p>15 %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43" office:value-type="percentage" office:value="0.18" calcext:value-type="percentage">
            <text:p>18 %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43" office:value-type="percentage" office:value="0.2" calcext:value-type="percentage">
            <text:p>20 %</text:p>
          </table:table-cell>
          <table:table-cell table:number-columns-repeated="16378"/>
        </table:table-row>
        <table:table-row table:style-name="ro1" table:number-rows-repeated="9">
          <table:table-cell table:number-columns-repeated="16384"/>
        </table:table-row>
        <table:table-row table:style-name="ro1" table:number-rows-repeated="11">
          <table:table-cell table:number-columns-repeated="5"/>
          <table:table-cell table:style-name="ce131"/>
          <table:table-cell/>
          <table:table-cell table:style-name="ce134"/>
          <table:table-cell table:number-columns-repeated="4"/>
          <table:table-cell table:style-name="ce137"/>
          <table:table-cell/>
          <table:table-cell table:style-name="ce139"/>
          <table:table-cell table:number-columns-repeated="6"/>
          <table:table-cell table:style-name="ce143"/>
          <table:table-cell/>
          <table:table-cell table:style-name="ce145"/>
          <table:table-cell table:number-columns-repeated="16360"/>
        </table:table-row>
        <table:table-row table:style-name="ro1" table:number-rows-repeated="5">
          <table:table-cell table:number-columns-repeated="16384"/>
        </table:table-row>
        <table:table-row table:style-name="ro1" table:number-rows-repeated="11">
          <table:table-cell table:number-columns-repeated="5"/>
          <table:table-cell table:style-name="ce132"/>
          <table:table-cell/>
          <table:table-cell table:style-name="ce135"/>
          <table:table-cell table:number-columns-repeated="4"/>
          <table:table-cell table:style-name="ce138"/>
          <table:table-cell/>
          <table:table-cell table:style-name="ce140"/>
          <table:table-cell table:number-columns-repeated="6"/>
          <table:table-cell table:style-name="ce144"/>
          <table:table-cell/>
          <table:table-cell table:style-name="ce146"/>
          <table:table-cell table:number-columns-repeated="16360"/>
        </table:table-row>
        <table:table-row table:style-name="ro1" table:number-rows-repeated="4">
          <table:table-cell table:number-columns-repeated="16384"/>
        </table:table-row>
        <table:table-row table:style-name="ro1" table:number-rows-repeated="11">
          <table:table-cell table:number-columns-repeated="5"/>
          <table:table-cell table:style-name="ce133"/>
          <table:table-cell/>
          <table:table-cell table:style-name="ce136"/>
          <table:table-cell table:number-columns-repeated="16376"/>
        </table:table-row>
        <table:table-row table:style-name="ro1" table:number-rows-repeated="7">
          <table:table-cell table:number-columns-repeated="16384"/>
        </table:table-row>
        <table:table-row table:style-name="ro1" table:number-rows-repeated="4">
          <table:table-cell table:number-columns-repeated="4"/>
          <table:table-cell table:style-name="ce130" table:number-columns-repeated="11"/>
          <table:table-cell table:number-columns-repeated="5"/>
          <table:table-cell table:style-name="ce141" table:number-columns-repeated="11"/>
          <table:table-cell table:number-columns-repeated="4"/>
          <table:table-cell table:style-name="ce147" table:number-columns-repeated="11"/>
          <table:table-cell table:number-columns-repeated="16338"/>
        </table:table-row>
        <table:table-row table:style-name="ro4">
          <table:table-cell table:number-columns-repeated="4"/>
          <table:table-cell table:style-name="ce130" table:number-columns-repeated="11"/>
          <table:table-cell table:number-columns-repeated="5"/>
          <table:table-cell table:style-name="ce141" table:number-columns-repeated="11"/>
          <table:table-cell table:number-columns-repeated="4"/>
          <table:table-cell table:style-name="ce147" table:number-columns-repeated="11"/>
          <table:table-cell table:number-columns-repeated="16338"/>
        </table:table-row>
        <table:table-row table:style-name="ro1" table:number-rows-repeated="6">
          <table:table-cell table:number-columns-repeated="4"/>
          <table:table-cell table:style-name="ce130" table:number-columns-repeated="11"/>
          <table:table-cell table:number-columns-repeated="5"/>
          <table:table-cell table:style-name="ce141" table:number-columns-repeated="11"/>
          <table:table-cell table:number-columns-repeated="4"/>
          <table:table-cell table:style-name="ce147" table:number-columns-repeated="11"/>
          <table:table-cell table:number-columns-repeated="16338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11">
          <table:table-cell table:number-columns-repeated="20"/>
          <table:table-cell table:style-name="ce142" table:number-columns-repeated="5"/>
          <table:table-cell table:number-columns-repeated="16359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Pesimista.U84:Pesimista.Y94">
            <calcext:condition calcext:apply-style-name="ConditionalStyle_1" calcext:value="&lt;0" calcext:base-cell-address="Pesimista.U84"/>
          </calcext:conditional-format>
          <calcext:conditional-format calcext:target-range-address="Pesimista.AJ70:Pesimista.AT80">
            <calcext:condition calcext:apply-style-name="ConditionalStyle_2" calcext:value="&lt;0" calcext:base-cell-address="Pesimista.AJ70"/>
          </calcext:conditional-format>
          <calcext:conditional-format calcext:target-range-address="Pesimista.U70:Pesimista.AE80">
            <calcext:condition calcext:apply-style-name="ConditionalStyle_3" calcext:value="&lt;0" calcext:base-cell-address="Pesimista.U70"/>
          </calcext:conditional-format>
          <calcext:conditional-format calcext:target-range-address="Pesimista.E70:Pesimista.O80">
            <calcext:condition calcext:apply-style-name="ConditionalStyle_4" calcext:value="&lt;0" calcext:base-cell-address="Pesimista.E70"/>
          </calcext:conditional-format>
          <calcext:conditional-format calcext:target-range-address="Pesimista.H52:Pesimista.H62">
            <calcext:condition calcext:apply-style-name="ConditionalStyle_5" calcext:value="&lt;0" calcext:base-cell-address="Pesimista.H52"/>
          </calcext:conditional-format>
          <calcext:conditional-format calcext:target-range-address="Pesimista.F52:Pesimista.F62">
            <calcext:condition calcext:apply-style-name="ConditionalStyle_6" calcext:value="&lt;0" calcext:base-cell-address="Pesimista.F52"/>
          </calcext:conditional-format>
          <calcext:conditional-format calcext:target-range-address="Pesimista.X37:Pesimista.X47">
            <calcext:condition calcext:apply-style-name="ConditionalStyle_7" calcext:value="&lt;0" calcext:base-cell-address="Pesimista.X37"/>
          </calcext:conditional-format>
          <calcext:conditional-format calcext:target-range-address="Pesimista.V37:Pesimista.V47">
            <calcext:condition calcext:apply-style-name="ConditionalStyle_8" calcext:value="&lt;0" calcext:base-cell-address="Pesimista.V37"/>
          </calcext:conditional-format>
          <calcext:conditional-format calcext:target-range-address="Pesimista.O37:Pesimista.O47">
            <calcext:condition calcext:apply-style-name="ConditionalStyle_9" calcext:value="&lt;0" calcext:base-cell-address="Pesimista.O37"/>
          </calcext:conditional-format>
          <calcext:conditional-format calcext:target-range-address="Pesimista.M37:Pesimista.M47">
            <calcext:condition calcext:apply-style-name="ConditionalStyle_10" calcext:value="&lt;0" calcext:base-cell-address="Pesimista.M37"/>
          </calcext:conditional-format>
          <calcext:conditional-format calcext:target-range-address="Pesimista.H37:Pesimista.H47">
            <calcext:condition calcext:apply-style-name="ConditionalStyle_11" calcext:value="&lt;0" calcext:base-cell-address="Pesimista.H37"/>
          </calcext:conditional-format>
          <calcext:conditional-format calcext:target-range-address="Pesimista.F37:Pesimista.F47">
            <calcext:condition calcext:apply-style-name="ConditionalStyle_12" calcext:value="&lt;0" calcext:base-cell-address="Pesimista.F37"/>
          </calcext:conditional-format>
          <calcext:conditional-format calcext:target-range-address="Pesimista.X21:Pesimista.X31">
            <calcext:condition calcext:apply-style-name="ConditionalStyle_13" calcext:value="&lt;0" calcext:base-cell-address="Pesimista.X21"/>
          </calcext:conditional-format>
          <calcext:conditional-format calcext:target-range-address="Pesimista.V21:Pesimista.V31">
            <calcext:condition calcext:apply-style-name="ConditionalStyle_14" calcext:value="&lt;0" calcext:base-cell-address="Pesimista.V21"/>
          </calcext:conditional-format>
          <calcext:conditional-format calcext:target-range-address="Pesimista.O21:Pesimista.O31">
            <calcext:condition calcext:apply-style-name="ConditionalStyle_15" calcext:value="&lt;0" calcext:base-cell-address="Pesimista.O21"/>
          </calcext:conditional-format>
          <calcext:conditional-format calcext:target-range-address="Pesimista.M21:Pesimista.M31">
            <calcext:condition calcext:apply-style-name="ConditionalStyle_16" calcext:value="&lt;0" calcext:base-cell-address="Pesimista.M21"/>
          </calcext:conditional-format>
          <calcext:conditional-format calcext:target-range-address="Pesimista.H21:Pesimista.H31">
            <calcext:condition calcext:apply-style-name="ConditionalStyle_17" calcext:value="&lt;0" calcext:base-cell-address="Pesimista.H21"/>
          </calcext:conditional-format>
          <calcext:conditional-format calcext:target-range-address="Pesimista.F21:Pesimista.F31">
            <calcext:condition calcext:apply-style-name="ConditionalStyle_18" calcext:value="&lt;0" calcext:base-cell-address="Pesimista.F21"/>
          </calcext:conditional-format>
        </calcext:conditional-formats>
      </table:table>
      <table:table table:name="Optimista" table:style-name="ta3">
        <table:scenario table:display-border="false" table:border-color="#c0c0c0" table:copy-back="false" table:copy-styles="false" table:copy-formulas="false" table:protected="true" table:is-active="false" table:scenario-ranges="Optimista.F6:Optimista.F11" table:comment="Creado por ASUS el 23/02/2021&#10;Modificado por ASUS el 25/02/2021"/>
        <table:table-column table:style-name="co4" table:default-cell-style-name="ce110"/>
        <table:table-column table:style-name="co5" table:default-cell-style-name="ce110"/>
        <table:table-column table:style-name="co6" table:default-cell-style-name="ce110"/>
        <table:table-column table:style-name="co7" table:default-cell-style-name="ce110"/>
        <table:table-column table:style-name="co8" table:number-columns-repeated="11" table:default-cell-style-name="ce110"/>
        <table:table-column table:style-name="co9" table:default-cell-style-name="ce110"/>
        <table:table-column table:style-name="co10" table:default-cell-style-name="ce110"/>
        <table:table-column table:style-name="co5" table:default-cell-style-name="ce110"/>
        <table:table-column table:style-name="co11" table:default-cell-style-name="ce110"/>
        <table:table-column table:style-name="co4" table:default-cell-style-name="ce110"/>
        <table:table-column table:style-name="co12" table:number-columns-repeated="3" table:default-cell-style-name="ce110"/>
        <table:table-column table:style-name="co13" table:default-cell-style-name="ce110"/>
        <table:table-column table:style-name="co12" table:number-columns-repeated="7" table:default-cell-style-name="ce110"/>
        <table:table-column table:style-name="co4" table:default-cell-style-name="ce110"/>
        <table:table-column table:style-name="co14" table:default-cell-style-name="ce110"/>
        <table:table-column table:style-name="co15" table:default-cell-style-name="ce110"/>
        <table:table-column table:style-name="co4" table:number-columns-repeated="16350" table:default-cell-style-name="ce110"/>
        <table:table-row table:style-name="ro5" table:number-rows-repeated="5">
          <table:table-cell table:number-columns-repeated="16384"/>
        </table:table-row>
        <table:table-row table:style-name="ro5">
          <table:table-cell table:number-columns-repeated="5"/>
          <table:table-cell table:style-name="ce43" office:value-type="percentage" office:value="0.15" calcext:value-type="percentage">
            <text:p>15 %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43" office:value-type="percentage" office:value="0.18" calcext:value-type="percentage">
            <text:p>18 %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12" office:value-type="percentage" office:value="0.2" calcext:value-type="percentage">
            <text:p>20 %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43" office:value-type="percentage" office:value="-0.1" calcext:value-type="percentage">
            <text:p>-10 %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43" office:value-type="percentage" office:value="-0.12" calcext:value-type="percentage">
            <text:p>-12 %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43" office:value-type="percentage" office:value="-0.18" calcext:value-type="percentage">
            <text:p>-18 %</text:p>
          </table:table-cell>
          <table:table-cell table:number-columns-repeated="16378"/>
        </table:table-row>
        <table:table-row table:style-name="ro1" table:number-rows-repeated="9">
          <table:table-cell table:number-columns-repeated="16384"/>
        </table:table-row>
        <table:table-row table:style-name="ro1" table:number-rows-repeated="11">
          <table:table-cell table:number-columns-repeated="5"/>
          <table:table-cell table:style-name="ce149"/>
          <table:table-cell/>
          <table:table-cell table:style-name="ce152"/>
          <table:table-cell table:number-columns-repeated="4"/>
          <table:table-cell table:style-name="ce155"/>
          <table:table-cell/>
          <table:table-cell table:style-name="ce157"/>
          <table:table-cell table:number-columns-repeated="6"/>
          <table:table-cell table:style-name="ce161"/>
          <table:table-cell/>
          <table:table-cell table:style-name="ce163"/>
          <table:table-cell table:number-columns-repeated="16360"/>
        </table:table-row>
        <table:table-row table:style-name="ro1" table:number-rows-repeated="5">
          <table:table-cell table:number-columns-repeated="16384"/>
        </table:table-row>
        <table:table-row table:style-name="ro1" table:number-rows-repeated="11">
          <table:table-cell table:number-columns-repeated="5"/>
          <table:table-cell table:style-name="ce150"/>
          <table:table-cell/>
          <table:table-cell table:style-name="ce153"/>
          <table:table-cell table:number-columns-repeated="4"/>
          <table:table-cell table:style-name="ce156"/>
          <table:table-cell/>
          <table:table-cell table:style-name="ce158"/>
          <table:table-cell table:number-columns-repeated="6"/>
          <table:table-cell table:style-name="ce162"/>
          <table:table-cell/>
          <table:table-cell table:style-name="ce164"/>
          <table:table-cell table:number-columns-repeated="16360"/>
        </table:table-row>
        <table:table-row table:style-name="ro1" table:number-rows-repeated="4">
          <table:table-cell table:number-columns-repeated="16384"/>
        </table:table-row>
        <table:table-row table:style-name="ro1" table:number-rows-repeated="11">
          <table:table-cell table:number-columns-repeated="5"/>
          <table:table-cell table:style-name="ce151"/>
          <table:table-cell/>
          <table:table-cell table:style-name="ce154"/>
          <table:table-cell table:number-columns-repeated="16376"/>
        </table:table-row>
        <table:table-row table:style-name="ro1" table:number-rows-repeated="7">
          <table:table-cell table:number-columns-repeated="16384"/>
        </table:table-row>
        <table:table-row table:style-name="ro1" table:number-rows-repeated="4">
          <table:table-cell table:number-columns-repeated="4"/>
          <table:table-cell table:style-name="ce148" table:number-columns-repeated="11"/>
          <table:table-cell table:number-columns-repeated="5"/>
          <table:table-cell table:style-name="ce159" table:number-columns-repeated="11"/>
          <table:table-cell table:number-columns-repeated="4"/>
          <table:table-cell table:style-name="ce165" table:number-columns-repeated="11"/>
          <table:table-cell table:number-columns-repeated="16338"/>
        </table:table-row>
        <table:table-row table:style-name="ro4">
          <table:table-cell table:number-columns-repeated="4"/>
          <table:table-cell table:style-name="ce148" table:number-columns-repeated="11"/>
          <table:table-cell table:number-columns-repeated="5"/>
          <table:table-cell table:style-name="ce159" table:number-columns-repeated="11"/>
          <table:table-cell table:number-columns-repeated="4"/>
          <table:table-cell table:style-name="ce165" table:number-columns-repeated="11"/>
          <table:table-cell table:number-columns-repeated="16338"/>
        </table:table-row>
        <table:table-row table:style-name="ro1" table:number-rows-repeated="6">
          <table:table-cell table:number-columns-repeated="4"/>
          <table:table-cell table:style-name="ce148" table:number-columns-repeated="11"/>
          <table:table-cell table:number-columns-repeated="5"/>
          <table:table-cell table:style-name="ce159" table:number-columns-repeated="11"/>
          <table:table-cell table:number-columns-repeated="4"/>
          <table:table-cell table:style-name="ce165" table:number-columns-repeated="11"/>
          <table:table-cell table:number-columns-repeated="16338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11">
          <table:table-cell table:number-columns-repeated="20"/>
          <table:table-cell table:style-name="ce160" table:number-columns-repeated="5"/>
          <table:table-cell table:number-columns-repeated="16359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Optimista.U84:Optimista.Y94">
            <calcext:condition calcext:apply-style-name="ConditionalStyle_1" calcext:value="&lt;0" calcext:base-cell-address="Optimista.U84"/>
          </calcext:conditional-format>
          <calcext:conditional-format calcext:target-range-address="Optimista.AJ70:Optimista.AT80">
            <calcext:condition calcext:apply-style-name="ConditionalStyle_2" calcext:value="&lt;0" calcext:base-cell-address="Optimista.AJ70"/>
          </calcext:conditional-format>
          <calcext:conditional-format calcext:target-range-address="Optimista.U70:Optimista.AE80">
            <calcext:condition calcext:apply-style-name="ConditionalStyle_3" calcext:value="&lt;0" calcext:base-cell-address="Optimista.U70"/>
          </calcext:conditional-format>
          <calcext:conditional-format calcext:target-range-address="Optimista.E70:Optimista.O80">
            <calcext:condition calcext:apply-style-name="ConditionalStyle_4" calcext:value="&lt;0" calcext:base-cell-address="Optimista.E70"/>
          </calcext:conditional-format>
          <calcext:conditional-format calcext:target-range-address="Optimista.H52:Optimista.H62">
            <calcext:condition calcext:apply-style-name="ConditionalStyle_5" calcext:value="&lt;0" calcext:base-cell-address="Optimista.H52"/>
          </calcext:conditional-format>
          <calcext:conditional-format calcext:target-range-address="Optimista.F52:Optimista.F62">
            <calcext:condition calcext:apply-style-name="ConditionalStyle_6" calcext:value="&lt;0" calcext:base-cell-address="Optimista.F52"/>
          </calcext:conditional-format>
          <calcext:conditional-format calcext:target-range-address="Optimista.X37:Optimista.X47">
            <calcext:condition calcext:apply-style-name="ConditionalStyle_7" calcext:value="&lt;0" calcext:base-cell-address="Optimista.X37"/>
          </calcext:conditional-format>
          <calcext:conditional-format calcext:target-range-address="Optimista.V37:Optimista.V47">
            <calcext:condition calcext:apply-style-name="ConditionalStyle_8" calcext:value="&lt;0" calcext:base-cell-address="Optimista.V37"/>
          </calcext:conditional-format>
          <calcext:conditional-format calcext:target-range-address="Optimista.O37:Optimista.O47">
            <calcext:condition calcext:apply-style-name="ConditionalStyle_9" calcext:value="&lt;0" calcext:base-cell-address="Optimista.O37"/>
          </calcext:conditional-format>
          <calcext:conditional-format calcext:target-range-address="Optimista.M37:Optimista.M47">
            <calcext:condition calcext:apply-style-name="ConditionalStyle_10" calcext:value="&lt;0" calcext:base-cell-address="Optimista.M37"/>
          </calcext:conditional-format>
          <calcext:conditional-format calcext:target-range-address="Optimista.H37:Optimista.H47">
            <calcext:condition calcext:apply-style-name="ConditionalStyle_11" calcext:value="&lt;0" calcext:base-cell-address="Optimista.H37"/>
          </calcext:conditional-format>
          <calcext:conditional-format calcext:target-range-address="Optimista.F37:Optimista.F47">
            <calcext:condition calcext:apply-style-name="ConditionalStyle_12" calcext:value="&lt;0" calcext:base-cell-address="Optimista.F37"/>
          </calcext:conditional-format>
          <calcext:conditional-format calcext:target-range-address="Optimista.X21:Optimista.X31">
            <calcext:condition calcext:apply-style-name="ConditionalStyle_13" calcext:value="&lt;0" calcext:base-cell-address="Optimista.X21"/>
          </calcext:conditional-format>
          <calcext:conditional-format calcext:target-range-address="Optimista.V21:Optimista.V31">
            <calcext:condition calcext:apply-style-name="ConditionalStyle_14" calcext:value="&lt;0" calcext:base-cell-address="Optimista.V21"/>
          </calcext:conditional-format>
          <calcext:conditional-format calcext:target-range-address="Optimista.O21:Optimista.O31">
            <calcext:condition calcext:apply-style-name="ConditionalStyle_15" calcext:value="&lt;0" calcext:base-cell-address="Optimista.O21"/>
          </calcext:conditional-format>
          <calcext:conditional-format calcext:target-range-address="Optimista.M21:Optimista.M31">
            <calcext:condition calcext:apply-style-name="ConditionalStyle_16" calcext:value="&lt;0" calcext:base-cell-address="Optimista.M21"/>
          </calcext:conditional-format>
          <calcext:conditional-format calcext:target-range-address="Optimista.H21:Optimista.H31">
            <calcext:condition calcext:apply-style-name="ConditionalStyle_17" calcext:value="&lt;0" calcext:base-cell-address="Optimista.H21"/>
          </calcext:conditional-format>
          <calcext:conditional-format calcext:target-range-address="Optimista.F21:Optimista.F31">
            <calcext:condition calcext:apply-style-name="ConditionalStyle_18" calcext:value="&lt;0" calcext:base-cell-address="Optimista.F21"/>
          </calcext:conditional-format>
        </calcext:conditional-formats>
      </table:table>
      <table:table table:name="Resumen" table:style-name="ta4">
        <table:table-column table:style-name="co4" table:default-cell-style-name="ce16"/>
        <table:table-column table:style-name="co13" table:number-columns-repeated="4" table:default-cell-style-name="ce16"/>
        <table:table-column table:style-name="co16" table:default-cell-style-name="ce94"/>
        <table:table-column table:style-name="co16" table:number-columns-repeated="11" table:default-cell-style-name="ce16"/>
        <table:table-column table:style-name="co17" table:default-cell-style-name="ce16"/>
        <table:table-column table:style-name="co4" table:number-columns-repeated="16366" table:default-cell-style-name="ce16"/>
        <table:table-row table:style-name="ro1">
          <table:table-cell table:number-columns-repeated="16384"/>
        </table:table-row>
        <table:table-row table:style-name="ro1">
          <table:table-cell/>
          <table:table-cell table:style-name="ce166" office:value-type="string" calcext:value-type="string" table:number-columns-spanned="3" table:number-rows-spanned="1">
            <text:p>Precio de venta</text:p>
          </table:table-cell>
          <table:covered-table-cell table:number-columns-repeated="2" table:style-name="ce166"/>
          <table:table-cell/>
          <table:table-cell table:style-name="ce42" office:value-type="string" calcext:value-type="string" table:number-columns-spanned="2" table:number-rows-spanned="1">
            <text:p>Impuesto</text:p>
          </table:table-cell>
          <table:covered-table-cell table:style-name="ce42"/>
          <table:table-cell table:number-columns-repeated="2"/>
          <table:table-cell table:style-name="ce73" table:number-columns-repeated="3"/>
          <table:table-cell table:number-columns-repeated="16372"/>
        </table:table-row>
        <table:table-row table:style-name="ro1">
          <table:table-cell/>
          <table:table-cell table:style-name="ce166"/>
          <table:table-cell table:style-name="ce166" office:value-type="string" calcext:value-type="string">
            <text:p>sin igv</text:p>
          </table:table-cell>
          <table:table-cell table:style-name="ce166" office:value-type="string" calcext:value-type="string">
            <text:p>con igv</text:p>
          </table:table-cell>
          <table:table-cell/>
          <table:table-cell table:style-name="ce23" office:value-type="string" calcext:value-type="string">
            <text:p>RG</text:p>
          </table:table-cell>
          <table:table-cell table:style-name="ce180" office:value-type="percentage" office:value="0.295" calcext:value-type="percentage">
            <text:p>29.50 %</text:p>
          </table:table-cell>
          <table:table-cell table:number-columns-repeated="2"/>
          <table:table-cell table:style-name="ce72"/>
          <table:table-cell table:style-name="ce80"/>
          <table:table-cell table:style-name="ce72"/>
          <table:table-cell table:number-columns-repeated="16372"/>
        </table:table-row>
        <table:table-row table:style-name="ro1">
          <table:table-cell/>
          <table:table-cell table:style-name="ce167" office:value-type="string" calcext:value-type="string">
            <text:p>Diesel B5</text:p>
          </table:table-cell>
          <table:table-cell table:style-name="ce170" table:formula="of:=+([.D4]/1.18)*(1+[$'Análisis de sensibilidad'.F6])" office:value-type="float" office:value="11.0084745762712" calcext:value-type="float">
            <text:p>11.01</text:p>
          </table:table-cell>
          <table:table-cell table:style-name="ce170" office:value-type="float" office:value="12.99" calcext:value-type="float">
            <text:p>12.99</text:p>
          </table:table-cell>
          <table:table-cell/>
          <table:table-cell table:style-name="ce176"/>
          <table:table-cell table:style-name="ce181"/>
          <table:table-cell table:number-columns-repeated="2"/>
          <table:table-cell table:style-name="ce72"/>
          <table:table-cell table:style-name="ce80"/>
          <table:table-cell table:style-name="ce72"/>
          <table:table-cell table:number-columns-repeated="16372"/>
        </table:table-row>
        <table:table-row table:style-name="ro1">
          <table:table-cell/>
          <table:table-cell table:style-name="ce167" office:value-type="string" calcext:value-type="string">
            <text:p>Gasohol 90</text:p>
          </table:table-cell>
          <table:table-cell table:style-name="ce170" table:formula="of:=+([.D5]/1.18)*(1+[$'Análisis de sensibilidad'.F7])" office:value-type="float" office:value="11.0457627118644" calcext:value-type="float">
            <text:p>11.05</text:p>
          </table:table-cell>
          <table:table-cell table:style-name="ce170" office:value-type="float" office:value="13.034" calcext:value-type="float">
            <text:p>13.03</text:p>
          </table:table-cell>
          <table:table-cell table:number-columns-repeated="5"/>
          <table:table-cell table:style-name="ce72"/>
          <table:table-cell table:style-name="ce80"/>
          <table:table-cell table:style-name="ce72"/>
          <table:table-cell table:number-columns-repeated="16372"/>
        </table:table-row>
        <table:table-row table:style-name="ro1">
          <table:table-cell/>
          <table:table-cell table:style-name="ce167" office:value-type="string" calcext:value-type="string">
            <text:p>Gasohol 95</text:p>
          </table:table-cell>
          <table:table-cell table:style-name="ce170" table:formula="of:=+([.D6]/1.18)*(1+[$'Análisis de sensibilidad'.F8])" office:value-type="float" office:value="11.8583898305085" calcext:value-type="float">
            <text:p>11.86</text:p>
          </table:table-cell>
          <table:table-cell table:style-name="ce170" office:value-type="float" office:value="13.9929" calcext:value-type="float">
            <text:p>13.99</text:p>
          </table:table-cell>
          <table:table-cell/>
          <table:table-cell table:style-name="ce42" office:value-type="string" calcext:value-type="string">
            <text:p>Tasa crec.</text:p>
          </table:table-cell>
          <table:table-cell table:number-columns-repeated="3"/>
          <table:table-cell table:style-name="ce72"/>
          <table:table-cell table:style-name="ce80"/>
          <table:table-cell table:style-name="ce183"/>
          <table:table-cell table:number-columns-repeated="16372"/>
        </table:table-row>
        <table:table-row table:style-name="ro1">
          <table:table-cell table:number-columns-repeated="5"/>
          <table:table-cell table:style-name="ce177" table:formula="of:=7%*(1+[$'Análisis de sensibilidad'.F13])" office:value-type="percentage" office:value="0.07" calcext:value-type="percentage">
            <text:p>7 %</text:p>
          </table:table-cell>
          <table:table-cell table:number-columns-repeated="3"/>
          <table:table-cell table:style-name="ce72"/>
          <table:table-cell table:style-name="ce80"/>
          <table:table-cell table:style-name="ce72"/>
          <table:table-cell table:number-columns-repeated="16372"/>
        </table:table-row>
        <table:table-row table:style-name="ro1">
          <table:table-cell/>
          <table:table-cell table:style-name="ce166" office:value-type="string" calcext:value-type="string" table:number-columns-spanned="3" table:number-rows-spanned="1">
            <text:p>Precio compra</text:p>
          </table:table-cell>
          <table:covered-table-cell table:style-name="ce171"/>
          <table:covered-table-cell table:style-name="ce174"/>
          <table:table-cell/>
          <table:table-cell table:style-name="ce96"/>
          <table:table-cell table:number-columns-repeated="3"/>
          <table:table-cell table:style-name="ce72"/>
          <table:table-cell table:style-name="ce80"/>
          <table:table-cell table:style-name="ce72"/>
          <table:table-cell table:number-columns-repeated="16372"/>
        </table:table-row>
        <table:table-row table:style-name="ro1">
          <table:table-cell/>
          <table:table-cell table:style-name="ce168"/>
          <table:table-cell table:style-name="ce166" office:value-type="string" calcext:value-type="string">
            <text:p>Sin igv</text:p>
          </table:table-cell>
          <table:table-cell table:style-name="ce166" office:value-type="string" calcext:value-type="string">
            <text:p>Con igv</text:p>
          </table:table-cell>
          <table:table-cell/>
          <table:table-cell table:style-name="ce178" office:value-type="string" calcext:value-type="string">
            <text:p>TEA</text:p>
          </table:table-cell>
          <table:table-cell table:number-columns-repeated="16378"/>
        </table:table-row>
        <table:table-row table:style-name="ro1">
          <table:table-cell/>
          <table:table-cell table:style-name="ce167" office:value-type="string" calcext:value-type="string">
            <text:p>Diesel B5</text:p>
          </table:table-cell>
          <table:table-cell table:style-name="ce172" table:formula="of:=+([.D10]/1.18)*(1+[$'Análisis de sensibilidad'.F9])" office:value-type="float" office:value="8.05889830508475" calcext:value-type="float">
            <text:p>8.06</text:p>
          </table:table-cell>
          <table:table-cell table:style-name="ce172" office:value-type="float" office:value="9.5095" calcext:value-type="float">
            <text:p>9.51</text:p>
          </table:table-cell>
          <table:table-cell/>
          <table:table-cell table:style-name="ce179" table:formula="of:=13.43%" office:value-type="percentage" office:value="0.1343" calcext:value-type="percentage">
            <text:p>13.43 %</text:p>
          </table:table-cell>
          <table:table-cell office:value-type="string" calcext:value-type="string">
            <text:p>FINANCIERA</text:p>
          </table:table-cell>
          <table:table-cell table:number-columns-repeated="16377"/>
        </table:table-row>
        <table:table-row table:style-name="ro1">
          <table:table-cell/>
          <table:table-cell table:style-name="ce167" office:value-type="string" calcext:value-type="string">
            <text:p>Gasohol 90</text:p>
          </table:table-cell>
          <table:table-cell table:style-name="ce172" table:formula="of:=+([.D11]/1.18)*(1+[$'Análisis de sensibilidad'.F10])" office:value-type="float" office:value="8.19576271186441" calcext:value-type="float">
            <text:p>8.20</text:p>
          </table:table-cell>
          <table:table-cell table:style-name="ce172" office:value-type="float" office:value="9.671" calcext:value-type="float">
            <text:p>9.67</text:p>
          </table:table-cell>
          <table:table-cell table:number-columns-repeated="16380"/>
        </table:table-row>
        <table:table-row table:style-name="ro1">
          <table:table-cell/>
          <table:table-cell table:style-name="ce167" office:value-type="string" calcext:value-type="string">
            <text:p>Gasohol 95</text:p>
          </table:table-cell>
          <table:table-cell table:style-name="ce172" table:formula="of:=+([.D12]/1.18)*(1+[$'Análisis de sensibilidad'.F11])" office:value-type="float" office:value="8.45338983050847" calcext:value-type="float">
            <text:p>8.45</text:p>
          </table:table-cell>
          <table:table-cell table:style-name="ce172" office:value-type="float" office:value="9.975" calcext:value-type="float">
            <text:p>9.98</text:p>
          </table:table-cell>
          <table:table-cell table:number-columns-repeated="16380"/>
        </table:table-row>
        <table:table-row table:style-name="ro1">
          <table:table-cell table:number-columns-repeated="5"/>
          <table:table-cell table:formula="of:=+([.C4]-[.C10])/[.C10]" office:value-type="float" office:value="0.366002418633998" calcext:value-type="float">
            <text:p>0.366002418633998</text:p>
          </table:table-cell>
          <table:table-cell table:number-columns-repeated="16378"/>
        </table:table-row>
        <table:table-row table:style-name="ro1">
          <table:table-cell/>
          <table:table-cell table:style-name="ce42" office:value-type="string" calcext:value-type="string">
            <text:p>Vulcanizado</text:p>
          </table:table-cell>
          <table:table-cell table:style-name="ce25" office:value-type="float" office:value="15" calcext:value-type="float">
            <text:p>15</text:p>
          </table:table-cell>
          <table:table-cell table:number-columns-repeated="2"/>
          <table:table-cell table:formula="of:=+([.C5]-[.C11])/[.C11]" office:value-type="float" office:value="0.347740667976424" calcext:value-type="float">
            <text:p>0.347740667976424</text:p>
          </table:table-cell>
          <table:table-cell table:style-name="ce182"/>
          <table:table-cell table:number-columns-repeated="16377"/>
        </table:table-row>
        <table:table-row table:style-name="ro1">
          <table:table-cell table:number-columns-repeated="5"/>
          <table:table-cell table:formula="of:=+([.C6]-[.C12])/[.C12]" office:value-type="float" office:value="0.402796992481203" calcext:value-type="float">
            <text:p>0.402796992481203</text:p>
          </table:table-cell>
          <table:table-cell table:style-name="ce182"/>
          <table:table-cell table:number-columns-repeated="16377"/>
        </table:table-row>
        <table:table-row table:style-name="ro1">
          <table:table-cell table:number-columns-repeated="6"/>
          <table:table-cell table:style-name="ce182"/>
          <table:table-cell table:number-columns-repeated="16377"/>
        </table:table-row>
        <table:table-row table:style-name="ro1">
          <table:table-cell/>
          <table:table-cell table:style-name="ce42" office:value-type="string" calcext:value-type="string">
            <text:p>VANE</text:p>
          </table:table-cell>
          <table:table-cell table:style-name="ce42" office:value-type="string" calcext:value-type="string">
            <text:p>TIRE</text:p>
          </table:table-cell>
          <table:table-cell table:style-name="ce42" office:value-type="string" calcext:value-type="string">
            <text:p>VANF</text:p>
          </table:table-cell>
          <table:table-cell table:style-name="ce42" office:value-type="string" calcext:value-type="string">
            <text:p>TIRF</text:p>
          </table:table-cell>
          <table:table-cell table:number-columns-repeated="16379"/>
        </table:table-row>
        <table:table-row table:style-name="ro1">
          <table:table-cell/>
          <table:table-cell table:style-name="ce169" table:formula="of:=+[$Rentabilidad.C11]" office:value-type="float" office:value="316805.562538153" calcext:value-type="float">
            <text:p>316,805.56</text:p>
          </table:table-cell>
          <table:table-cell table:style-name="ce173" table:formula="of:=+[$Rentabilidad.C13]" office:value-type="percentage" office:value="0.238841809921468" calcext:value-type="percentage">
            <text:p>23.88 %</text:p>
          </table:table-cell>
          <table:table-cell table:style-name="ce175" table:formula="of:=+[$Rentabilidad.C23]" office:value-type="float" office:value="504085.186566147" calcext:value-type="float">
            <text:p>S/ 504,085.19</text:p>
          </table:table-cell>
          <table:table-cell table:style-name="ce173" table:formula="of:=+[$Rentabilidad.C25]" office:value-type="percentage" office:value="0.282726593166351" calcext:value-type="percentage">
            <text:p>28.27 %</text:p>
          </table:table-cell>
          <table:table-cell table:number-columns-repeated="16379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versión inicial" table:style-name="ta5">
        <table:table-column table:style-name="co4" table:default-cell-style-name="ce16"/>
        <table:table-column table:style-name="co18" table:default-cell-style-name="ce16"/>
        <table:table-column table:style-name="co4" table:default-cell-style-name="ce16"/>
        <table:table-column table:style-name="co19" table:default-cell-style-name="ce16"/>
        <table:table-column table:style-name="co20" table:number-columns-repeated="5" table:default-cell-style-name="ce16"/>
        <table:table-column table:style-name="co4" table:number-columns-repeated="3" table:default-cell-style-name="ce16"/>
        <table:table-column table:style-name="co21" table:default-cell-style-name="ce16"/>
        <table:table-column table:style-name="co4" table:number-columns-repeated="16371" table:default-cell-style-name="ce16"/>
        <table:table-row table:style-name="ro1">
          <table:table-cell table:number-columns-repeated="16384"/>
        </table:table-row>
        <table:table-row table:style-name="ro1">
          <table:table-cell/>
          <table:table-cell table:style-name="ce184" office:value-type="string" calcext:value-type="string" table:number-columns-spanned="8" table:number-rows-spanned="1">
            <text:p>CUADRO N°03</text:p>
          </table:table-cell>
          <table:covered-table-cell table:number-columns-repeated="7" table:style-name="ce188"/>
          <table:table-cell table:number-columns-repeated="16375"/>
        </table:table-row>
        <table:table-row table:style-name="ro1">
          <table:table-cell/>
          <table:table-cell table:style-name="ce184" office:value-type="string" calcext:value-type="string" table:number-columns-spanned="8" table:number-rows-spanned="1">
            <text:p>PRESUPUESTO DE INVERSIÓN Y FINANCIAMIENTO</text:p>
          </table:table-cell>
          <table:covered-table-cell table:number-columns-repeated="7" table:style-name="ce188"/>
          <table:table-cell table:number-columns-repeated="16375"/>
        </table:table-row>
        <table:table-row table:style-name="ro1">
          <table:table-cell table:number-columns-repeated="7"/>
          <table:table-cell table:style-name="ce194" table:formula="of:=+[.H42]/[.G42]" office:value-type="float" office:value="0.628939675917026" calcext:value-type="float">
            <text:p>0.63</text:p>
          </table:table-cell>
          <table:table-cell table:style-name="ce194" table:formula="of:=1-[.H4]" office:value-type="float" office:value="0.371060324082974" calcext:value-type="float">
            <text:p>0.37</text:p>
          </table:table-cell>
          <table:table-cell table:number-columns-repeated="16375"/>
        </table:table-row>
        <table:table-row table:style-name="ro1">
          <table:table-cell/>
          <table:table-cell table:style-name="ce185" office:value-type="string" calcext:value-type="string" table:number-columns-spanned="1" table:number-rows-spanned="2">
            <text:p>RUBRO</text:p>
          </table:table-cell>
          <table:table-cell table:style-name="ce189" office:value-type="string" calcext:value-type="string" table:number-columns-spanned="5" table:number-rows-spanned="1">
            <text:p>INVERSIÓN INICIAL</text:p>
          </table:table-cell>
          <table:covered-table-cell table:number-columns-repeated="4" table:style-name="ce189"/>
          <table:table-cell table:style-name="ce189" office:value-type="string" calcext:value-type="string" table:number-columns-spanned="2" table:number-rows-spanned="1">
            <text:p>FINANCIAMIENTO</text:p>
          </table:table-cell>
          <table:covered-table-cell table:style-name="ce196"/>
          <table:table-cell table:number-columns-repeated="16375"/>
        </table:table-row>
        <table:table-row table:style-name="ro6">
          <table:table-cell/>
          <table:covered-table-cell table:style-name="ce186"/>
          <table:table-cell table:style-name="ce190" office:value-type="string" calcext:value-type="string">
            <text:p>Unidad de Medida</text:p>
          </table:table-cell>
          <table:table-cell table:style-name="ce190" office:value-type="string" calcext:value-type="string">
            <text:p>Unidad Requerida</text:p>
          </table:table-cell>
          <table:table-cell table:style-name="ce190" office:value-type="string" calcext:value-type="string">
            <text:p>Valor Unitario</text:p>
          </table:table-cell>
          <table:table-cell table:style-name="ce190" office:value-type="string" calcext:value-type="string">
            <text:p>Total sin igv</text:p>
          </table:table-cell>
          <table:table-cell table:style-name="ce190" office:value-type="string" calcext:value-type="string">
            <text:p>Total con igv</text:p>
          </table:table-cell>
          <table:table-cell table:style-name="ce190" office:value-type="string" calcext:value-type="string">
            <text:p>Capital Propio</text:p>
          </table:table-cell>
          <table:table-cell table:style-name="ce190" office:value-type="string" calcext:value-type="string">
            <text:p>Préstamo</text:p>
          </table:table-cell>
          <table:table-cell table:number-columns-repeated="16375"/>
        </table:table-row>
        <table:table-row table:style-name="ro1">
          <table:table-cell/>
          <table:table-cell table:style-name="ce23" office:value-type="string" calcext:value-type="string">
            <text:p>ACTIVO FIJO</text:p>
          </table:table-cell>
          <table:table-cell table:style-name="ce23" table:number-columns-repeated="4"/>
          <table:table-cell table:style-name="ce191" table:formula="of:=+[.G8]+[.G27]" office:value-type="float" office:value="868465.581428572" calcext:value-type="float">
            <text:p>868,465.58</text:p>
          </table:table-cell>
          <table:table-cell table:style-name="ce23" table:number-columns-repeated="2"/>
          <table:table-cell table:number-columns-repeated="16375"/>
        </table:table-row>
        <table:table-row table:style-name="ro1">
          <table:table-cell/>
          <table:table-cell table:style-name="ce187" office:value-type="string" calcext:value-type="string">
            <text:p>A. TANGIBLES</text:p>
          </table:table-cell>
          <table:table-cell table:style-name="ce187" table:number-columns-repeated="2"/>
          <table:table-cell table:style-name="ce191"/>
          <table:table-cell table:style-name="ce191" table:formula="of:=SUM([.F9:.F25])*(1+[$'Análisis de sensibilidad'.F12])" office:value-type="float" office:value="750225.069007264" calcext:value-type="float">
            <text:p>750,225.07</text:p>
          </table:table-cell>
          <table:table-cell table:style-name="ce191" table:formula="of:=SUM([.G9:.G25])" office:value-type="float" office:value="849265.581428572" calcext:value-type="float">
            <text:p>849,265.58</text:p>
          </table:table-cell>
          <table:table-cell table:style-name="ce191" table:number-columns-repeated="2"/>
          <table:table-cell table:number-columns-repeated="16375"/>
        </table:table-row>
        <table:table-row table:style-name="ro1">
          <table:table-cell/>
          <table:table-cell table:style-name="ce23" office:value-type="string" calcext:value-type="string">
            <text:p>Terreno</text:p>
          </table:table-cell>
          <table:table-cell table:style-name="ce23" office:value-type="string" calcext:value-type="string">
            <text:p>m2</text:p>
          </table:table-cell>
          <table:table-cell table:style-name="ce23" office:value-type="float" office:value="1000" calcext:value-type="float">
            <text:p>1000</text:p>
          </table:table-cell>
          <table:table-cell table:style-name="ce59" office:value-type="float" office:value="200" calcext:value-type="float">
            <text:p>200.00</text:p>
          </table:table-cell>
          <table:table-cell table:style-name="ce59" office:value-type="float" office:value="200000" calcext:value-type="float">
            <text:p>200,000.00</text:p>
          </table:table-cell>
          <table:table-cell table:style-name="ce59" table:formula="of:=+[.D9]*[.E9]" office:value-type="float" office:value="200000" calcext:value-type="float">
            <text:p>200,000.00</text:p>
          </table:table-cell>
          <table:table-cell table:style-name="ce59" office:value-type="float" office:value="200000" calcext:value-type="float">
            <text:p>200,000.00</text:p>
          </table:table-cell>
          <table:table-cell table:style-name="ce59"/>
          <table:table-cell table:number-columns-repeated="16375"/>
        </table:table-row>
        <table:table-row table:style-name="ro1">
          <table:table-cell/>
          <table:table-cell table:style-name="ce23" office:value-type="string" calcext:value-type="string">
            <text:p>Obras civiles</text:p>
          </table:table-cell>
          <table:table-cell table:style-name="ce23" office:value-type="string" calcext:value-type="string">
            <text:p>Global</text:p>
          </table:table-cell>
          <table:table-cell table:style-name="ce23" office:value-type="float" office:value="1" calcext:value-type="float">
            <text:p>1</text:p>
          </table:table-cell>
          <table:table-cell table:style-name="ce59" office:value-type="float" office:value="350000" calcext:value-type="float">
            <text:p>350,000.00</text:p>
          </table:table-cell>
          <table:table-cell table:style-name="ce192" table:formula="of:=+[.G10]/1.18" office:value-type="float" office:value="296610.169491525" calcext:value-type="float">
            <text:p>296,610.17</text:p>
          </table:table-cell>
          <table:table-cell table:style-name="ce193" table:formula="of:=+[.D10]*[.E10]" office:value-type="float" office:value="350000" calcext:value-type="float">
            <text:p>350,000.00</text:p>
          </table:table-cell>
          <table:table-cell table:style-name="ce59"/>
          <table:table-cell table:style-name="ce59" office:value-type="float" office:value="350000" calcext:value-type="float">
            <text:p>350,000.00</text:p>
          </table:table-cell>
          <table:table-cell table:number-columns-repeated="16375"/>
        </table:table-row>
        <table:table-row table:style-name="ro1">
          <table:table-cell/>
          <table:table-cell table:style-name="ce23" office:value-type="string" calcext:value-type="string">
            <text:p>Obras Mecánicas de CL</text:p>
          </table:table-cell>
          <table:table-cell table:style-name="ce23" office:value-type="string" calcext:value-type="string">
            <text:p>Global</text:p>
          </table:table-cell>
          <table:table-cell table:style-name="ce23" office:value-type="float" office:value="1" calcext:value-type="float">
            <text:p>1</text:p>
          </table:table-cell>
          <table:table-cell table:style-name="ce59" office:value-type="float" office:value="48136.75" calcext:value-type="float">
            <text:p>48,136.75</text:p>
          </table:table-cell>
          <table:table-cell table:style-name="ce192" table:formula="of:=+[.G11]/1.18" office:value-type="float" office:value="40793.8559322034" calcext:value-type="float">
            <text:p>40,793.86</text:p>
          </table:table-cell>
          <table:table-cell table:style-name="ce59" table:formula="of:=+[.D11]*[.E11]" office:value-type="float" office:value="48136.75" calcext:value-type="float">
            <text:p>48,136.75</text:p>
          </table:table-cell>
          <table:table-cell table:style-name="ce59" office:value-type="float" office:value="48136.75" calcext:value-type="float">
            <text:p>48,136.75</text:p>
          </table:table-cell>
          <table:table-cell table:style-name="ce59"/>
          <table:table-cell table:number-columns-repeated="16375"/>
        </table:table-row>
        <table:table-row table:style-name="ro1">
          <table:table-cell/>
          <table:table-cell table:style-name="ce23" office:value-type="string" calcext:value-type="string">
            <text:p>Metal mecánico</text:p>
          </table:table-cell>
          <table:table-cell table:style-name="ce23" office:value-type="string" calcext:value-type="string">
            <text:p>Global</text:p>
          </table:table-cell>
          <table:table-cell table:style-name="ce23" office:value-type="float" office:value="1" calcext:value-type="float">
            <text:p>1</text:p>
          </table:table-cell>
          <table:table-cell table:style-name="ce59" office:value-type="float" office:value="104782.9" calcext:value-type="float">
            <text:p>104,782.90</text:p>
          </table:table-cell>
          <table:table-cell table:style-name="ce192" table:formula="of:=+[.G12]/1.18" office:value-type="float" office:value="88799.0677966102" calcext:value-type="float">
            <text:p>88,799.07</text:p>
          </table:table-cell>
          <table:table-cell table:style-name="ce59" table:formula="of:=+[.D12]*[.E12]" office:value-type="float" office:value="104782.9" calcext:value-type="float">
            <text:p>104,782.90</text:p>
          </table:table-cell>
          <table:table-cell table:style-name="ce59" office:value-type="float" office:value="104782.9" calcext:value-type="float">
            <text:p>104,782.90</text:p>
          </table:table-cell>
          <table:table-cell table:style-name="ce59"/>
          <table:table-cell table:number-columns-repeated="16375"/>
        </table:table-row>
        <table:table-row table:style-name="ro1">
          <table:table-cell/>
          <table:table-cell table:style-name="ce23" office:value-type="string" calcext:value-type="string">
            <text:p>Obras eléctricas de CL</text:p>
          </table:table-cell>
          <table:table-cell table:style-name="ce23" office:value-type="string" calcext:value-type="string">
            <text:p>Global</text:p>
          </table:table-cell>
          <table:table-cell table:style-name="ce23" office:value-type="float" office:value="1" calcext:value-type="float">
            <text:p>1</text:p>
          </table:table-cell>
          <table:table-cell table:style-name="ce59" office:value-type="float" office:value="15892.4214285714" calcext:value-type="float">
            <text:p>15,892.42</text:p>
          </table:table-cell>
          <table:table-cell table:style-name="ce192" table:formula="of:=+[.G13]/1.18" office:value-type="float" office:value="13468.1537530266" calcext:value-type="float">
            <text:p>13,468.15</text:p>
          </table:table-cell>
          <table:table-cell table:style-name="ce59" table:formula="of:=+[.D13]*[.E13]" office:value-type="float" office:value="15892.4214285714" calcext:value-type="float">
            <text:p>15,892.42</text:p>
          </table:table-cell>
          <table:table-cell table:style-name="ce59" office:value-type="float" office:value="15892.4214285714" calcext:value-type="float">
            <text:p>15,892.42</text:p>
          </table:table-cell>
          <table:table-cell table:style-name="ce59"/>
          <table:table-cell table:number-columns-repeated="16375"/>
        </table:table-row>
        <table:table-row table:style-name="ro1">
          <table:table-cell/>
          <table:table-cell table:style-name="ce23" office:value-type="string" calcext:value-type="string">
            <text:p>Muebles</text:p>
          </table:table-cell>
          <table:table-cell table:style-name="ce23" office:value-type="string" calcext:value-type="string">
            <text:p>Global</text:p>
          </table:table-cell>
          <table:table-cell table:style-name="ce23" office:value-type="float" office:value="1" calcext:value-type="float">
            <text:p>1</text:p>
          </table:table-cell>
          <table:table-cell table:style-name="ce59" office:value-type="float" office:value="1000" calcext:value-type="float">
            <text:p>1,000.00</text:p>
          </table:table-cell>
          <table:table-cell table:style-name="ce192" table:formula="of:=+[.G14]/1.18" office:value-type="float" office:value="847.457627118644" calcext:value-type="float">
            <text:p>847.46</text:p>
          </table:table-cell>
          <table:table-cell table:style-name="ce59" table:formula="of:=+[.D14]*[.E14]" office:value-type="float" office:value="1000" calcext:value-type="float">
            <text:p>1,000.00</text:p>
          </table:table-cell>
          <table:table-cell table:style-name="ce59" office:value-type="float" office:value="1000" calcext:value-type="float">
            <text:p>1,000.00</text:p>
          </table:table-cell>
          <table:table-cell table:style-name="ce59"/>
          <table:table-cell table:number-columns-repeated="16375"/>
        </table:table-row>
        <table:table-row table:style-name="ro1">
          <table:table-cell/>
          <table:table-cell table:style-name="ce23" office:value-type="string" calcext:value-type="string">
            <text:p>Tanque de almacenamiento</text:p>
          </table:table-cell>
          <table:table-cell table:style-name="ce23" office:value-type="string" calcext:value-type="string">
            <text:p>Unidad</text:p>
          </table:table-cell>
          <table:table-cell table:style-name="ce23" office:value-type="float" office:value="2" calcext:value-type="float">
            <text:p>2</text:p>
          </table:table-cell>
          <table:table-cell table:style-name="ce59" office:value-type="float" office:value="17000" calcext:value-type="float">
            <text:p>17,000.00</text:p>
          </table:table-cell>
          <table:table-cell table:style-name="ce192" table:formula="of:=+[.G15]/1.18" office:value-type="float" office:value="28813.5593220339" calcext:value-type="float">
            <text:p>28,813.56</text:p>
          </table:table-cell>
          <table:table-cell table:style-name="ce59" table:formula="of:=+[.D15]*[.E15]" office:value-type="float" office:value="34000" calcext:value-type="float">
            <text:p>34,000.00</text:p>
          </table:table-cell>
          <table:table-cell table:style-name="ce59" office:value-type="float" office:value="34000" calcext:value-type="float">
            <text:p>34,000.00</text:p>
          </table:table-cell>
          <table:table-cell table:style-name="ce59"/>
          <table:table-cell table:number-columns-repeated="16375"/>
        </table:table-row>
        <table:table-row table:style-name="ro1">
          <table:table-cell/>
          <table:table-cell table:style-name="ce23" office:value-type="string" calcext:value-type="string">
            <text:p>Accesorios mecánicos</text:p>
          </table:table-cell>
          <table:table-cell table:style-name="ce23" office:value-type="string" calcext:value-type="string">
            <text:p>Global</text:p>
          </table:table-cell>
          <table:table-cell table:style-name="ce23" office:value-type="float" office:value="1" calcext:value-type="float">
            <text:p>1</text:p>
          </table:table-cell>
          <table:table-cell table:style-name="ce59" office:value-type="float" office:value="10500" calcext:value-type="float">
            <text:p>10,500.00</text:p>
          </table:table-cell>
          <table:table-cell table:style-name="ce192" table:formula="of:=+[.G16]/1.18" office:value-type="float" office:value="8898.30508474576" calcext:value-type="float">
            <text:p>8,898.31</text:p>
          </table:table-cell>
          <table:table-cell table:style-name="ce59" table:formula="of:=+[.D16]*[.E16]" office:value-type="float" office:value="10500" calcext:value-type="float">
            <text:p>10,500.00</text:p>
          </table:table-cell>
          <table:table-cell table:style-name="ce59" office:value-type="float" office:value="10500" calcext:value-type="float">
            <text:p>10,500.00</text:p>
          </table:table-cell>
          <table:table-cell table:style-name="ce59"/>
          <table:table-cell table:number-columns-repeated="16375"/>
        </table:table-row>
        <table:table-row table:style-name="ro1">
          <table:table-cell/>
          <table:table-cell table:style-name="ce23" office:value-type="string" calcext:value-type="string">
            <text:p>Dispensador de CL</text:p>
          </table:table-cell>
          <table:table-cell table:style-name="ce23" office:value-type="string" calcext:value-type="string">
            <text:p>Unidad</text:p>
          </table:table-cell>
          <table:table-cell table:style-name="ce23" office:value-type="float" office:value="2" calcext:value-type="float">
            <text:p>2</text:p>
          </table:table-cell>
          <table:table-cell table:style-name="ce59" office:value-type="float" office:value="24000" calcext:value-type="float">
            <text:p>24,000.00</text:p>
          </table:table-cell>
          <table:table-cell table:style-name="ce192" table:formula="of:=+[.G17]/1.18" office:value-type="float" office:value="40677.9661016949" calcext:value-type="float">
            <text:p>40,677.97</text:p>
          </table:table-cell>
          <table:table-cell table:style-name="ce59" table:formula="of:=+[.D17]*[.E17]" office:value-type="float" office:value="48000" calcext:value-type="float">
            <text:p>48,000.00</text:p>
          </table:table-cell>
          <table:table-cell table:style-name="ce59" office:value-type="float" office:value="48000" calcext:value-type="float">
            <text:p>48,000.00</text:p>
          </table:table-cell>
          <table:table-cell table:style-name="ce59"/>
          <table:table-cell table:number-columns-repeated="16375"/>
        </table:table-row>
        <table:table-row table:style-name="ro1">
          <table:table-cell/>
          <table:table-cell table:style-name="ce23" office:value-type="string" calcext:value-type="string">
            <text:p>Bomba CL</text:p>
          </table:table-cell>
          <table:table-cell table:style-name="ce23" office:value-type="string" calcext:value-type="string">
            <text:p>Unidad</text:p>
          </table:table-cell>
          <table:table-cell table:style-name="ce23" office:value-type="float" office:value="3" calcext:value-type="float">
            <text:p>3</text:p>
          </table:table-cell>
          <table:table-cell table:style-name="ce59" office:value-type="float" office:value="5251.17" calcext:value-type="float">
            <text:p>5,251.17</text:p>
          </table:table-cell>
          <table:table-cell table:style-name="ce192" table:formula="of:=+[.G18]/1.18" office:value-type="float" office:value="13350.4322033898" calcext:value-type="float">
            <text:p>13,350.43</text:p>
          </table:table-cell>
          <table:table-cell table:style-name="ce59" table:formula="of:=+[.D18]*[.E18]" office:value-type="float" office:value="15753.51" calcext:value-type="float">
            <text:p>15,753.51</text:p>
          </table:table-cell>
          <table:table-cell table:style-name="ce59" office:value-type="float" office:value="15753.51" calcext:value-type="float">
            <text:p>15,753.51</text:p>
          </table:table-cell>
          <table:table-cell table:style-name="ce59"/>
          <table:table-cell table:number-columns-repeated="16375"/>
        </table:table-row>
        <table:table-row table:style-name="ro1">
          <table:table-cell/>
          <table:table-cell table:style-name="ce23" office:value-type="string" calcext:value-type="string">
            <text:p>Equipos de seguridad</text:p>
          </table:table-cell>
          <table:table-cell table:style-name="ce23" office:value-type="string" calcext:value-type="string">
            <text:p>Global</text:p>
          </table:table-cell>
          <table:table-cell table:style-name="ce23" office:value-type="float" office:value="1" calcext:value-type="float">
            <text:p>1</text:p>
          </table:table-cell>
          <table:table-cell table:style-name="ce59" office:value-type="float" office:value="500" calcext:value-type="float">
            <text:p>500.00</text:p>
          </table:table-cell>
          <table:table-cell table:style-name="ce192" table:formula="of:=+[.G19]/1.18" office:value-type="float" office:value="423.728813559322" calcext:value-type="float">
            <text:p>423.73</text:p>
          </table:table-cell>
          <table:table-cell table:style-name="ce59" table:formula="of:=+[.D19]*[.E19]" office:value-type="float" office:value="500" calcext:value-type="float">
            <text:p>500.00</text:p>
          </table:table-cell>
          <table:table-cell table:style-name="ce59" office:value-type="float" office:value="500" calcext:value-type="float">
            <text:p>500.00</text:p>
          </table:table-cell>
          <table:table-cell table:style-name="ce59"/>
          <table:table-cell table:number-columns-repeated="16375"/>
        </table:table-row>
        <table:table-row table:style-name="ro1">
          <table:table-cell/>
          <table:table-cell table:style-name="ce23" office:value-type="string" calcext:value-type="string">
            <text:p>Consola</text:p>
          </table:table-cell>
          <table:table-cell table:style-name="ce23" office:value-type="string" calcext:value-type="string">
            <text:p>Global</text:p>
          </table:table-cell>
          <table:table-cell table:style-name="ce23" office:value-type="float" office:value="1" calcext:value-type="float">
            <text:p>1</text:p>
          </table:table-cell>
          <table:table-cell table:style-name="ce59" office:value-type="float" office:value="1000" calcext:value-type="float">
            <text:p>1,000.00</text:p>
          </table:table-cell>
          <table:table-cell table:style-name="ce192" table:formula="of:=+[.G20]/1.18" office:value-type="float" office:value="847.457627118644" calcext:value-type="float">
            <text:p>847.46</text:p>
          </table:table-cell>
          <table:table-cell table:style-name="ce59" table:formula="of:=+[.D20]*[.E20]" office:value-type="float" office:value="1000" calcext:value-type="float">
            <text:p>1,000.00</text:p>
          </table:table-cell>
          <table:table-cell table:style-name="ce59" office:value-type="float" office:value="1000" calcext:value-type="float">
            <text:p>1,000.00</text:p>
          </table:table-cell>
          <table:table-cell table:style-name="ce59"/>
          <table:table-cell table:number-columns-repeated="16375"/>
        </table:table-row>
        <table:table-row table:style-name="ro1">
          <table:table-cell/>
          <table:table-cell table:style-name="ce23" office:value-type="string" calcext:value-type="string">
            <text:p>Gata lagarto</text:p>
          </table:table-cell>
          <table:table-cell table:style-name="ce23" office:value-type="string" calcext:value-type="string">
            <text:p>Global</text:p>
          </table:table-cell>
          <table:table-cell table:style-name="ce23" office:value-type="float" office:value="1" calcext:value-type="float">
            <text:p>1</text:p>
          </table:table-cell>
          <table:table-cell table:style-name="ce59" office:value-type="float" office:value="1500" calcext:value-type="float">
            <text:p>1,500.00</text:p>
          </table:table-cell>
          <table:table-cell table:style-name="ce192" table:formula="of:=+[.G21]/1.18" office:value-type="float" office:value="1271.18644067797" calcext:value-type="float">
            <text:p>1,271.19</text:p>
          </table:table-cell>
          <table:table-cell table:style-name="ce59" table:formula="of:=+[.D21]*[.E21]" office:value-type="float" office:value="1500" calcext:value-type="float">
            <text:p>1,500.00</text:p>
          </table:table-cell>
          <table:table-cell table:style-name="ce59" office:value-type="float" office:value="1500" calcext:value-type="float">
            <text:p>1,500.00</text:p>
          </table:table-cell>
          <table:table-cell table:style-name="ce59"/>
          <table:table-cell table:number-columns-repeated="16375"/>
        </table:table-row>
        <table:table-row table:style-name="ro1">
          <table:table-cell/>
          <table:table-cell table:style-name="ce23" office:value-type="string" calcext:value-type="string">
            <text:p>Máquina desllantadora</text:p>
          </table:table-cell>
          <table:table-cell table:style-name="ce23" office:value-type="string" calcext:value-type="string">
            <text:p>Global</text:p>
          </table:table-cell>
          <table:table-cell table:style-name="ce23" office:value-type="float" office:value="1" calcext:value-type="float">
            <text:p>1</text:p>
          </table:table-cell>
          <table:table-cell table:style-name="ce59" office:value-type="float" office:value="5000" calcext:value-type="float">
            <text:p>5,000.00</text:p>
          </table:table-cell>
          <table:table-cell table:style-name="ce192" table:formula="of:=+[.G22]/1.18" office:value-type="float" office:value="4237.28813559322" calcext:value-type="float">
            <text:p>4,237.29</text:p>
          </table:table-cell>
          <table:table-cell table:style-name="ce59" table:formula="of:=+[.D22]*[.E22]" office:value-type="float" office:value="5000" calcext:value-type="float">
            <text:p>5,000.00</text:p>
          </table:table-cell>
          <table:table-cell table:style-name="ce59" office:value-type="float" office:value="5000" calcext:value-type="float">
            <text:p>5,000.00</text:p>
          </table:table-cell>
          <table:table-cell table:style-name="ce59"/>
          <table:table-cell table:number-columns-repeated="16375"/>
        </table:table-row>
        <table:table-row table:style-name="ro1">
          <table:table-cell/>
          <table:table-cell table:style-name="ce23" office:value-type="string" calcext:value-type="string">
            <text:p>Compresora</text:p>
          </table:table-cell>
          <table:table-cell table:style-name="ce23" office:value-type="string" calcext:value-type="string">
            <text:p>Global</text:p>
          </table:table-cell>
          <table:table-cell table:style-name="ce23" office:value-type="float" office:value="1" calcext:value-type="float">
            <text:p>1</text:p>
          </table:table-cell>
          <table:table-cell table:style-name="ce59" office:value-type="float" office:value="8000" calcext:value-type="float">
            <text:p>8,000.00</text:p>
          </table:table-cell>
          <table:table-cell table:style-name="ce192" table:formula="of:=+[.G23]/1.18" office:value-type="float" office:value="6779.66101694915" calcext:value-type="float">
            <text:p>6,779.66</text:p>
          </table:table-cell>
          <table:table-cell table:style-name="ce59" table:formula="of:=+[.D23]*[.E23]" office:value-type="float" office:value="8000" calcext:value-type="float">
            <text:p>8,000.00</text:p>
          </table:table-cell>
          <table:table-cell table:style-name="ce59" office:value-type="float" office:value="8000" calcext:value-type="float">
            <text:p>8,000.00</text:p>
          </table:table-cell>
          <table:table-cell table:style-name="ce59"/>
          <table:table-cell table:number-columns-repeated="16375"/>
        </table:table-row>
        <table:table-row table:style-name="ro1">
          <table:table-cell/>
          <table:table-cell table:style-name="ce23" office:value-type="string" calcext:value-type="string">
            <text:p>Juego de llaves</text:p>
          </table:table-cell>
          <table:table-cell table:style-name="ce23" office:value-type="string" calcext:value-type="string">
            <text:p>Global</text:p>
          </table:table-cell>
          <table:table-cell table:style-name="ce23" office:value-type="float" office:value="1" calcext:value-type="float">
            <text:p>1</text:p>
          </table:table-cell>
          <table:table-cell table:style-name="ce59" office:value-type="float" office:value="2000" calcext:value-type="float">
            <text:p>2,000.00</text:p>
          </table:table-cell>
          <table:table-cell table:style-name="ce192" table:formula="of:=+[.G24]/1.18" office:value-type="float" office:value="1694.91525423729" calcext:value-type="float">
            <text:p>1,694.92</text:p>
          </table:table-cell>
          <table:table-cell table:style-name="ce59" table:formula="of:=+[.D24]*[.E24]" office:value-type="float" office:value="2000" calcext:value-type="float">
            <text:p>2,000.00</text:p>
          </table:table-cell>
          <table:table-cell table:style-name="ce59" office:value-type="float" office:value="2000" calcext:value-type="float">
            <text:p>2,000.00</text:p>
          </table:table-cell>
          <table:table-cell table:style-name="ce59"/>
          <table:table-cell table:number-columns-repeated="16375"/>
        </table:table-row>
        <table:table-row table:style-name="ro1">
          <table:table-cell/>
          <table:table-cell table:style-name="ce23" office:value-type="string" calcext:value-type="string">
            <text:p>Equipos informáticos</text:p>
          </table:table-cell>
          <table:table-cell table:style-name="ce23" office:value-type="string" calcext:value-type="string">
            <text:p>Global</text:p>
          </table:table-cell>
          <table:table-cell table:style-name="ce23" office:value-type="float" office:value="2" calcext:value-type="float">
            <text:p>2</text:p>
          </table:table-cell>
          <table:table-cell table:style-name="ce59" office:value-type="float" office:value="1600" calcext:value-type="float">
            <text:p>1,600.00</text:p>
          </table:table-cell>
          <table:table-cell table:style-name="ce192" table:formula="of:=+[.G25]/1.18" office:value-type="float" office:value="2711.86440677966" calcext:value-type="float">
            <text:p>2,711.86</text:p>
          </table:table-cell>
          <table:table-cell table:style-name="ce59" table:formula="of:=+[.D25]*[.E25]" office:value-type="float" office:value="3200" calcext:value-type="float">
            <text:p>3,200.00</text:p>
          </table:table-cell>
          <table:table-cell table:style-name="ce59" office:value-type="float" office:value="3200" calcext:value-type="float">
            <text:p>3,200.00</text:p>
          </table:table-cell>
          <table:table-cell table:style-name="ce59"/>
          <table:table-cell table:number-columns-repeated="16375"/>
        </table:table-row>
        <table:table-row table:style-name="ro1">
          <table:table-cell/>
          <table:table-cell table:style-name="ce23" table:number-columns-repeated="3"/>
          <table:table-cell table:style-name="ce59" table:number-columns-repeated="5"/>
          <table:table-cell table:number-columns-repeated="16375"/>
        </table:table-row>
        <table:table-row table:style-name="ro1">
          <table:table-cell/>
          <table:table-cell table:style-name="ce187" office:value-type="string" calcext:value-type="string">
            <text:p>B. INTANGIBLES</text:p>
          </table:table-cell>
          <table:table-cell table:style-name="ce187" table:number-columns-repeated="2"/>
          <table:table-cell table:style-name="ce191"/>
          <table:table-cell table:style-name="ce191" table:formula="of:=SUM([.F28:.F31])" office:value-type="float" office:value="16759.3220338983" calcext:value-type="float">
            <text:p>16,759.32</text:p>
          </table:table-cell>
          <table:table-cell table:style-name="ce191" table:formula="of:=SUM([.G28:.G31])" office:value-type="float" office:value="19200" calcext:value-type="float">
            <text:p>19,200.00</text:p>
          </table:table-cell>
          <table:table-cell table:style-name="ce191" table:number-columns-repeated="2"/>
          <table:table-cell/>
          <table:table-cell office:value-type="string" calcext:value-type="string">
            <text:p>SIN IGV</text:p>
          </table:table-cell>
          <table:table-cell office:value-type="string" calcext:value-type="string">
            <text:p>CON IGV</text:p>
          </table:table-cell>
          <table:table-cell office:value-type="string" calcext:value-type="string">
            <text:p>IGV</text:p>
          </table:table-cell>
          <table:table-cell table:number-columns-repeated="16371"/>
        </table:table-row>
        <table:table-row table:style-name="ro1">
          <table:table-cell/>
          <table:table-cell table:style-name="ce23" office:value-type="string" calcext:value-type="string">
            <text:p>Constitución y formalizacion</text:p>
          </table:table-cell>
          <table:table-cell table:style-name="ce23" office:value-type="string" calcext:value-type="string">
            <text:p>Global</text:p>
          </table:table-cell>
          <table:table-cell table:style-name="ce23" office:value-type="float" office:value="1" calcext:value-type="float">
            <text:p>1</text:p>
          </table:table-cell>
          <table:table-cell table:style-name="ce59" office:value-type="float" office:value="16000" calcext:value-type="float">
            <text:p>16,000.00</text:p>
          </table:table-cell>
          <table:table-cell table:style-name="ce192" table:formula="of:=+[.G28]/1.18" office:value-type="float" office:value="13559.3220338983" calcext:value-type="float">
            <text:p>13,559.32</text:p>
          </table:table-cell>
          <table:table-cell table:style-name="ce59" table:formula="of:=+[.D28]*[.E28]" office:value-type="float" office:value="16000" calcext:value-type="float">
            <text:p>16,000.00</text:p>
          </table:table-cell>
          <table:table-cell table:style-name="ce59" office:value-type="float" office:value="16000" calcext:value-type="float">
            <text:p>16,000.00</text:p>
          </table:table-cell>
          <table:table-cell table:style-name="ce59"/>
          <table:table-cell/>
          <table:table-cell table:style-name="ce195" table:formula="of:=SUM([.F10:.F25])+[.F28]" office:value-type="float" office:value="563784.391041162" calcext:value-type="float">
            <text:p>563,784.39</text:p>
          </table:table-cell>
          <table:table-cell table:style-name="ce197" table:formula="of:=[.K28]*1.18" office:value-type="float" office:value="665265.581428572" calcext:value-type="float">
            <text:p>665266</text:p>
          </table:table-cell>
          <table:table-cell table:style-name="ce197" table:formula="of:=[.L28]-[.K28]" office:value-type="float" office:value="101481.190387409" calcext:value-type="float">
            <text:p>101481</text:p>
          </table:table-cell>
          <table:table-cell table:number-columns-repeated="16371"/>
        </table:table-row>
        <table:table-row table:style-name="ro1">
          <table:table-cell/>
          <table:table-cell table:style-name="ce23" office:value-type="string" calcext:value-type="string">
            <text:p>Licencias</text:p>
          </table:table-cell>
          <table:table-cell table:style-name="ce23" office:value-type="string" calcext:value-type="string">
            <text:p>Global</text:p>
          </table:table-cell>
          <table:table-cell table:style-name="ce23" office:value-type="float" office:value="1" calcext:value-type="float">
            <text:p>1</text:p>
          </table:table-cell>
          <table:table-cell table:style-name="ce59" office:value-type="float" office:value="700" calcext:value-type="float">
            <text:p>700.00</text:p>
          </table:table-cell>
          <table:table-cell table:style-name="ce59" table:formula="of:=+[.G29]/1" office:value-type="float" office:value="700" calcext:value-type="float">
            <text:p>700.00</text:p>
          </table:table-cell>
          <table:table-cell table:style-name="ce59" table:formula="of:=+[.D29]*[.E29]" office:value-type="float" office:value="700" calcext:value-type="float">
            <text:p>700.00</text:p>
          </table:table-cell>
          <table:table-cell table:style-name="ce59" office:value-type="float" office:value="700" calcext:value-type="float">
            <text:p>700.00</text:p>
          </table:table-cell>
          <table:table-cell table:style-name="ce59"/>
          <table:table-cell table:number-columns-repeated="16375"/>
        </table:table-row>
        <table:table-row table:style-name="ro1">
          <table:table-cell/>
          <table:table-cell table:style-name="ce23" office:value-type="string" calcext:value-type="string">
            <text:p>Certificaciones</text:p>
          </table:table-cell>
          <table:table-cell table:style-name="ce23" office:value-type="string" calcext:value-type="string">
            <text:p>Global</text:p>
          </table:table-cell>
          <table:table-cell table:style-name="ce23" office:value-type="float" office:value="1" calcext:value-type="float">
            <text:p>1</text:p>
          </table:table-cell>
          <table:table-cell table:style-name="ce59" office:value-type="float" office:value="1500" calcext:value-type="float">
            <text:p>1,500.00</text:p>
          </table:table-cell>
          <table:table-cell table:style-name="ce59" table:formula="of:=+[.G30]/1" office:value-type="float" office:value="1500" calcext:value-type="float">
            <text:p>1,500.00</text:p>
          </table:table-cell>
          <table:table-cell table:style-name="ce59" table:formula="of:=+[.D30]*[.E30]" office:value-type="float" office:value="1500" calcext:value-type="float">
            <text:p>1,500.00</text:p>
          </table:table-cell>
          <table:table-cell table:style-name="ce59" office:value-type="float" office:value="1500" calcext:value-type="float">
            <text:p>1,500.00</text:p>
          </table:table-cell>
          <table:table-cell table:style-name="ce59"/>
          <table:table-cell table:number-columns-repeated="16375"/>
        </table:table-row>
        <table:table-row table:style-name="ro1">
          <table:table-cell/>
          <table:table-cell table:style-name="ce23" office:value-type="string" calcext:value-type="string">
            <text:p>Capacitaciones</text:p>
          </table:table-cell>
          <table:table-cell table:style-name="ce23" office:value-type="string" calcext:value-type="string">
            <text:p>Global</text:p>
          </table:table-cell>
          <table:table-cell table:style-name="ce23" office:value-type="float" office:value="1" calcext:value-type="float">
            <text:p>1</text:p>
          </table:table-cell>
          <table:table-cell table:style-name="ce59" office:value-type="float" office:value="1000" calcext:value-type="float">
            <text:p>1,000.00</text:p>
          </table:table-cell>
          <table:table-cell table:style-name="ce59" table:formula="of:=+[.G31]/1" office:value-type="float" office:value="1000" calcext:value-type="float">
            <text:p>1,000.00</text:p>
          </table:table-cell>
          <table:table-cell table:style-name="ce59" table:formula="of:=+[.D31]*[.E31]" office:value-type="float" office:value="1000" calcext:value-type="float">
            <text:p>1,000.00</text:p>
          </table:table-cell>
          <table:table-cell table:style-name="ce59" office:value-type="float" office:value="1000" calcext:value-type="float">
            <text:p>1,000.00</text:p>
          </table:table-cell>
          <table:table-cell table:style-name="ce59"/>
          <table:table-cell table:number-columns-repeated="16375"/>
        </table:table-row>
        <table:table-row table:style-name="ro1">
          <table:table-cell/>
          <table:table-cell table:style-name="ce23" office:value-type="string" calcext:value-type="string">
            <text:p>Promocion</text:p>
          </table:table-cell>
          <table:table-cell table:style-name="ce23" table:number-columns-repeated="2"/>
          <table:table-cell table:style-name="ce59" table:number-columns-repeated="5"/>
          <table:table-cell table:number-columns-repeated="16375"/>
        </table:table-row>
        <table:table-row table:style-name="ro1">
          <table:table-cell/>
          <table:table-cell table:style-name="ce23" office:value-type="string" calcext:value-type="string">
            <text:p>Implementación y puesta en marcha</text:p>
          </table:table-cell>
          <table:table-cell table:style-name="ce23" table:number-columns-repeated="2"/>
          <table:table-cell table:style-name="ce59" table:number-columns-repeated="5"/>
          <table:table-cell table:number-columns-repeated="16375"/>
        </table:table-row>
        <table:table-row table:style-name="ro1">
          <table:table-cell/>
          <table:table-cell table:style-name="ce23" office:value-type="string" calcext:value-type="string">
            <text:p>TOTAL DE ACTIVO FIJO</text:p>
          </table:table-cell>
          <table:table-cell table:style-name="ce23" table:number-columns-repeated="2"/>
          <table:table-cell table:style-name="ce59" table:number-columns-repeated="5"/>
          <table:table-cell table:number-columns-repeated="16375"/>
        </table:table-row>
        <table:table-row table:style-name="ro1">
          <table:table-cell/>
          <table:table-cell table:style-name="ce187" office:value-type="string" calcext:value-type="string">
            <text:p>CAPITAL DE TRABAJO </text:p>
          </table:table-cell>
          <table:table-cell table:style-name="ce187" table:number-columns-repeated="2"/>
          <table:table-cell table:style-name="ce191"/>
          <table:table-cell table:style-name="ce191" table:formula="of:=SUM([.F36:.F41])" office:value-type="float" office:value="63370.5720445501" calcext:value-type="float">
            <text:p>63,370.57</text:p>
          </table:table-cell>
          <table:table-cell table:style-name="ce191" table:formula="of:=SUM([.G36:.G41])" office:value-type="float" office:value="74777.2750125691" calcext:value-type="float">
            <text:p>74,777.28</text:p>
          </table:table-cell>
          <table:table-cell table:style-name="ce191" table:number-columns-repeated="2"/>
          <table:table-cell table:number-columns-repeated="16375"/>
        </table:table-row>
        <table:table-row table:style-name="ro1">
          <table:table-cell/>
          <table:table-cell table:style-name="ce23" office:value-type="string" calcext:value-type="string">
            <text:p>Materia prima (Combustible)</text:p>
          </table:table-cell>
          <table:table-cell table:style-name="ce23" office:value-type="string" calcext:value-type="string">
            <text:p>Global</text:p>
          </table:table-cell>
          <table:table-cell table:style-name="ce23" office:value-type="float" office:value="1" calcext:value-type="float">
            <text:p>1</text:p>
          </table:table-cell>
          <table:table-cell table:style-name="ce59" table:formula="of:=+[$Capital_Trabajo.P16]" office:value-type="float" office:value="63370.5720445501" calcext:value-type="float">
            <text:p>63,370.57</text:p>
          </table:table-cell>
          <table:table-cell table:style-name="ce59" table:formula="of:=+[.D36]*[.E36]" office:value-type="float" office:value="63370.5720445501" calcext:value-type="float">
            <text:p>63,370.57</text:p>
          </table:table-cell>
          <table:table-cell table:style-name="ce59" table:formula="of:=+[.F36]*(1+0.18)" office:value-type="float" office:value="74777.2750125691" calcext:value-type="float">
            <text:p>74,777.28</text:p>
          </table:table-cell>
          <table:table-cell table:style-name="ce59" table:formula="of:=+[.G36]" office:value-type="float" office:value="74777.2750125691" calcext:value-type="float">
            <text:p>74,777.28</text:p>
          </table:table-cell>
          <table:table-cell table:style-name="ce59"/>
          <table:table-cell table:number-columns-repeated="16375"/>
        </table:table-row>
        <table:table-row table:style-name="ro1" table:visibility="collapse">
          <table:table-cell/>
          <table:table-cell table:style-name="ce23" office:value-type="string" calcext:value-type="string">
            <text:p>mano de obra</text:p>
          </table:table-cell>
          <table:table-cell table:style-name="ce23" table:number-columns-repeated="2"/>
          <table:table-cell table:style-name="ce59" table:number-columns-repeated="5"/>
          <table:table-cell table:number-columns-repeated="16375"/>
        </table:table-row>
        <table:table-row table:style-name="ro1" table:visibility="collapse">
          <table:table-cell/>
          <table:table-cell table:style-name="ce23" office:value-type="string" calcext:value-type="string">
            <text:p>Costos Indirectos de Produccion</text:p>
          </table:table-cell>
          <table:table-cell table:style-name="ce23" table:number-columns-repeated="2"/>
          <table:table-cell table:style-name="ce59" table:number-columns-repeated="5"/>
          <table:table-cell table:number-columns-repeated="16375"/>
        </table:table-row>
        <table:table-row table:style-name="ro1" table:visibility="collapse">
          <table:table-cell/>
          <table:table-cell table:style-name="ce23" office:value-type="string" calcext:value-type="string">
            <text:p>Gastos de Administracion</text:p>
          </table:table-cell>
          <table:table-cell table:style-name="ce23" table:number-columns-repeated="2"/>
          <table:table-cell table:style-name="ce59" table:number-columns-repeated="5"/>
          <table:table-cell table:number-columns-repeated="16375"/>
        </table:table-row>
        <table:table-row table:style-name="ro1" table:visibility="collapse">
          <table:table-cell/>
          <table:table-cell table:style-name="ce23" office:value-type="string" calcext:value-type="string">
            <text:p>Gastos de Ventas</text:p>
          </table:table-cell>
          <table:table-cell table:style-name="ce23" table:number-columns-repeated="2"/>
          <table:table-cell table:style-name="ce59" table:number-columns-repeated="5"/>
          <table:table-cell table:number-columns-repeated="16375"/>
        </table:table-row>
        <table:table-row table:style-name="ro1">
          <table:table-cell/>
          <table:table-cell table:style-name="ce23" office:value-type="string" calcext:value-type="string">
            <text:p>TOTAL DE CAPITAL DE TRABAJO</text:p>
          </table:table-cell>
          <table:table-cell table:style-name="ce23" table:number-columns-repeated="2"/>
          <table:table-cell table:style-name="ce59" table:number-columns-repeated="5"/>
          <table:table-cell table:number-columns-repeated="16375"/>
        </table:table-row>
        <table:table-row table:style-name="ro1">
          <table:table-cell/>
          <table:table-cell table:style-name="ce187" office:value-type="string" calcext:value-type="string">
            <text:p>TOTAL DE INVERSIÓN</text:p>
          </table:table-cell>
          <table:table-cell table:style-name="ce187" table:number-columns-repeated="2"/>
          <table:table-cell table:style-name="ce191"/>
          <table:table-cell table:style-name="ce191" table:formula="of:=793031.535786925*(1+[$'Análisis de sensibilidad'.F12])" office:value-type="float" office:value="793031.535786925" calcext:value-type="float">
            <text:p>793,031.54</text:p>
          </table:table-cell>
          <table:table-cell table:style-name="ce191" table:formula="of:=+([.G35]+[.G27]+[.G8])" office:value-type="float" office:value="943242.856441141" calcext:value-type="float">
            <text:p>943,242.86</text:p>
          </table:table-cell>
          <table:table-cell table:style-name="ce191" table:formula="of:=SUM([.H7:.H41])" office:value-type="float" office:value="593242.856441141" calcext:value-type="float">
            <text:p>593,242.86</text:p>
          </table:table-cell>
          <table:table-cell table:style-name="ce191" table:formula="of:=SUM([.I7:.I41])" office:value-type="float" office:value="350000" calcext:value-type="float">
            <text:p>350,000.00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195" table:formula="of:=[.H42]+[.I42]" office:value-type="float" office:value="943242.856441141" calcext:value-type="float">
            <text:p>943,242.86</text:p>
          </table:table-cell>
          <table:table-cell table:number-columns-repeated="16376"/>
        </table:table-row>
        <table:table-row table:style-name="ro1" table:number-rows-repeated="104853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preciación y VR" table:style-name="ta6">
        <table:table-column table:style-name="co4" table:default-cell-style-name="ce16"/>
        <table:table-column table:style-name="co22" table:default-cell-style-name="ce16"/>
        <table:table-column table:style-name="co23" table:number-columns-repeated="6" table:default-cell-style-name="ce16"/>
        <table:table-column table:style-name="co4" table:number-columns-repeated="16376" table:default-cell-style-name="ce16"/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Vida proyecto</text:p>
          </table:table-cell>
          <table:table-cell table:style-name="ce204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/>
          <table:table-cell table:style-name="ce184" office:value-type="string" calcext:value-type="string" table:number-columns-spanned="7" table:number-rows-spanned="1">
            <text:p>CUADRO N° 04</text:p>
          </table:table-cell>
          <table:covered-table-cell table:number-columns-repeated="6" table:style-name="ce188"/>
          <table:table-cell table:number-columns-repeated="16376"/>
        </table:table-row>
        <table:table-row table:style-name="ro1">
          <table:table-cell/>
          <table:table-cell table:style-name="ce92" office:value-type="string" calcext:value-type="string" table:number-columns-spanned="7" table:number-rows-spanned="1">
            <text:p>TABLA DE DEPRECIACIONES Y VALOR DE RECUPERO</text:p>
          </table:table-cell>
          <table:covered-table-cell table:number-columns-repeated="6" table:style-name="ce92"/>
          <table:table-cell table:number-columns-repeated="16376"/>
        </table:table-row>
        <table:table-row table:style-name="ro1">
          <table:table-cell/>
          <table:table-cell table:style-name="ce198" table:number-columns-repeated="7"/>
          <table:table-cell table:number-columns-repeated="16376"/>
        </table:table-row>
        <table:table-row table:style-name="ro7">
          <table:table-cell/>
          <table:table-cell table:style-name="ce185" office:value-type="string" calcext:value-type="string">
            <text:p>ACTIVO FIJO</text:p>
          </table:table-cell>
          <table:table-cell table:style-name="ce200" office:value-type="string" calcext:value-type="string">
            <text:p>Valor de compra</text:p>
          </table:table-cell>
          <table:table-cell table:style-name="ce200" office:value-type="string" calcext:value-type="string">
            <text:p>Vida útil (años)</text:p>
          </table:table-cell>
          <table:table-cell table:style-name="ce200" office:value-type="string" calcext:value-type="string">
            <text:p>Tasa de Depreciacion</text:p>
          </table:table-cell>
          <table:table-cell table:style-name="ce200" office:value-type="string" calcext:value-type="string">
            <text:p>Depreciación anual</text:p>
          </table:table-cell>
          <table:table-cell table:style-name="ce200" office:value-type="string" calcext:value-type="string">
            <text:p>Depreciación Acumulada</text:p>
          </table:table-cell>
          <table:table-cell table:style-name="ce200" office:value-type="string" calcext:value-type="string">
            <text:p>Valor de Recupero</text:p>
          </table:table-cell>
          <table:table-cell table:number-columns-repeated="16376"/>
        </table:table-row>
        <table:table-row table:style-name="ro1">
          <table:table-cell/>
          <table:table-cell table:style-name="ce23" office:value-type="string" calcext:value-type="string">
            <text:p>Terreno</text:p>
          </table:table-cell>
          <table:table-cell table:style-name="ce59" table:formula="of:=+[$'Inversión inicial'.F9]" office:value-type="float" office:value="200000" calcext:value-type="float">
            <text:p>200,000.00</text:p>
          </table:table-cell>
          <table:table-cell table:style-name="ce202" office:value-type="float" office:value="0" calcext:value-type="float">
            <text:p>0</text:p>
          </table:table-cell>
          <table:table-cell table:style-name="ce203" office:value-type="percentage" office:value="0" calcext:value-type="percentage">
            <text:p>0 %</text:p>
          </table:table-cell>
          <table:table-cell table:number-columns-repeated="2" table:style-name="ce67" office:value-type="float" office:value="0" calcext:value-type="float">
            <text:p>0.00</text:p>
          </table:table-cell>
          <table:table-cell table:style-name="ce67" office:value-type="float" office:value="200000" calcext:value-type="float">
            <text:p>200000.00</text:p>
          </table:table-cell>
          <table:table-cell table:number-columns-repeated="16376"/>
        </table:table-row>
        <table:table-row table:style-name="ro1">
          <table:table-cell/>
          <table:table-cell table:style-name="ce23" office:value-type="string" calcext:value-type="string">
            <text:p>Obras civiles</text:p>
          </table:table-cell>
          <table:table-cell table:style-name="ce59" table:formula="of:=+[$'Inversión inicial'.F10]" office:value-type="float" office:value="296610.169491525" calcext:value-type="float">
            <text:p>296,610.17</text:p>
          </table:table-cell>
          <table:table-cell table:style-name="ce202" table:formula="of:=1/[.E8]" office:value-type="float" office:value="33.3333333333333" calcext:value-type="float">
            <text:p>33</text:p>
          </table:table-cell>
          <table:table-cell table:style-name="ce203" office:value-type="percentage" office:value="0.03" calcext:value-type="percentage">
            <text:p>3 %</text:p>
          </table:table-cell>
          <table:table-cell table:style-name="ce67" table:formula="of:=+[.C8]*[.E8]" office:value-type="float" office:value="8898.30508474576" calcext:value-type="float">
            <text:p>8898.31</text:p>
          </table:table-cell>
          <table:table-cell table:style-name="ce67" table:formula="of:=+[.F8]*[.$H$2]" office:value-type="float" office:value="88983.0508474576" calcext:value-type="float">
            <text:p>88983.05</text:p>
          </table:table-cell>
          <table:table-cell table:style-name="ce67" table:formula="of:=+[.C8]-[.G8]" office:value-type="float" office:value="207627.118644068" calcext:value-type="float">
            <text:p>207627.12</text:p>
          </table:table-cell>
          <table:table-cell table:number-columns-repeated="16376"/>
        </table:table-row>
        <table:table-row table:style-name="ro1">
          <table:table-cell/>
          <table:table-cell table:style-name="ce23" office:value-type="string" calcext:value-type="string">
            <text:p>Obras Mecánicas de CL</text:p>
          </table:table-cell>
          <table:table-cell table:style-name="ce59" table:formula="of:=+[$'Inversión inicial'.F11]" office:value-type="float" office:value="40793.8559322034" calcext:value-type="float">
            <text:p>40,793.86</text:p>
          </table:table-cell>
          <table:table-cell table:style-name="ce202" table:formula="of:=1/[.E9]" office:value-type="float" office:value="10" calcext:value-type="float">
            <text:p>10</text:p>
          </table:table-cell>
          <table:table-cell table:style-name="ce203" office:value-type="percentage" office:value="0.1" calcext:value-type="percentage">
            <text:p>10 %</text:p>
          </table:table-cell>
          <table:table-cell table:style-name="ce67" table:formula="of:=+[.C9]*[.E9]" office:value-type="float" office:value="4079.38559322034" calcext:value-type="float">
            <text:p>4079.39</text:p>
          </table:table-cell>
          <table:table-cell table:style-name="ce67" table:formula="of:=+[.F9]*[.$H$2]" office:value-type="float" office:value="40793.8559322034" calcext:value-type="float">
            <text:p>40793.86</text:p>
          </table:table-cell>
          <table:table-cell table:style-name="ce67" table:formula="of:=+[.C9]-[.G9]" office:value-type="float" office:value="0" calcext:value-type="float">
            <text:p>0.00</text:p>
          </table:table-cell>
          <table:table-cell table:number-columns-repeated="16376"/>
        </table:table-row>
        <table:table-row table:style-name="ro1">
          <table:table-cell/>
          <table:table-cell table:style-name="ce23" office:value-type="string" calcext:value-type="string">
            <text:p>Metal mecánico</text:p>
          </table:table-cell>
          <table:table-cell table:style-name="ce59" table:formula="of:=+[$'Inversión inicial'.F12]" office:value-type="float" office:value="88799.0677966102" calcext:value-type="float">
            <text:p>88,799.07</text:p>
          </table:table-cell>
          <table:table-cell table:style-name="ce202" table:formula="of:=1/[.E10]" office:value-type="float" office:value="10" calcext:value-type="float">
            <text:p>10</text:p>
          </table:table-cell>
          <table:table-cell table:style-name="ce203" office:value-type="percentage" office:value="0.1" calcext:value-type="percentage">
            <text:p>10 %</text:p>
          </table:table-cell>
          <table:table-cell table:style-name="ce67" table:formula="of:=+[.C10]*[.E10]" office:value-type="float" office:value="8879.90677966102" calcext:value-type="float">
            <text:p>8879.91</text:p>
          </table:table-cell>
          <table:table-cell table:style-name="ce67" table:formula="of:=+[.F10]*[.$H$2]" office:value-type="float" office:value="88799.0677966102" calcext:value-type="float">
            <text:p>88799.07</text:p>
          </table:table-cell>
          <table:table-cell table:style-name="ce67" table:formula="of:=+[.C10]-[.G10]" office:value-type="float" office:value="0" calcext:value-type="float">
            <text:p>0.00</text:p>
          </table:table-cell>
          <table:table-cell table:number-columns-repeated="16376"/>
        </table:table-row>
        <table:table-row table:style-name="ro1">
          <table:table-cell/>
          <table:table-cell table:style-name="ce23" office:value-type="string" calcext:value-type="string">
            <text:p>Obras eléctricas de CL</text:p>
          </table:table-cell>
          <table:table-cell table:style-name="ce59" table:formula="of:=+[$'Inversión inicial'.F13]" office:value-type="float" office:value="13468.1537530266" calcext:value-type="float">
            <text:p>13,468.15</text:p>
          </table:table-cell>
          <table:table-cell table:style-name="ce202" table:formula="of:=1/[.E11]" office:value-type="float" office:value="10" calcext:value-type="float">
            <text:p>10</text:p>
          </table:table-cell>
          <table:table-cell table:style-name="ce203" office:value-type="percentage" office:value="0.1" calcext:value-type="percentage">
            <text:p>10 %</text:p>
          </table:table-cell>
          <table:table-cell table:style-name="ce67" table:formula="of:=+[.C11]*[.E11]" office:value-type="float" office:value="1346.81537530266" calcext:value-type="float">
            <text:p>1346.82</text:p>
          </table:table-cell>
          <table:table-cell table:style-name="ce67" table:formula="of:=+[.F11]*[.$H$2]" office:value-type="float" office:value="13468.1537530266" calcext:value-type="float">
            <text:p>13468.15</text:p>
          </table:table-cell>
          <table:table-cell table:style-name="ce67" table:formula="of:=+[.C11]-[.G11]" office:value-type="float" office:value="0" calcext:value-type="float">
            <text:p>0.00</text:p>
          </table:table-cell>
          <table:table-cell table:number-columns-repeated="16376"/>
        </table:table-row>
        <table:table-row table:style-name="ro1">
          <table:table-cell/>
          <table:table-cell table:style-name="ce23" office:value-type="string" calcext:value-type="string">
            <text:p>Muebles</text:p>
          </table:table-cell>
          <table:table-cell table:style-name="ce59" table:formula="of:=+[$'Inversión inicial'.F14]" office:value-type="float" office:value="847.457627118644" calcext:value-type="float">
            <text:p>847.46</text:p>
          </table:table-cell>
          <table:table-cell table:style-name="ce202" table:formula="of:=1/[.E12]" office:value-type="float" office:value="10" calcext:value-type="float">
            <text:p>10</text:p>
          </table:table-cell>
          <table:table-cell table:style-name="ce203" office:value-type="percentage" office:value="0.1" calcext:value-type="percentage">
            <text:p>10 %</text:p>
          </table:table-cell>
          <table:table-cell table:style-name="ce67" table:formula="of:=+[.C12]*[.E12]" office:value-type="float" office:value="84.7457627118644" calcext:value-type="float">
            <text:p>84.75</text:p>
          </table:table-cell>
          <table:table-cell table:style-name="ce67" table:formula="of:=+[.F12]*[.$H$2]" office:value-type="float" office:value="847.457627118644" calcext:value-type="float">
            <text:p>847.46</text:p>
          </table:table-cell>
          <table:table-cell table:style-name="ce67" table:formula="of:=+[.C12]-[.G12]" office:value-type="float" office:value="0" calcext:value-type="float">
            <text:p>0.00</text:p>
          </table:table-cell>
          <table:table-cell table:number-columns-repeated="16376"/>
        </table:table-row>
        <table:table-row table:style-name="ro1">
          <table:table-cell/>
          <table:table-cell table:style-name="ce23" office:value-type="string" calcext:value-type="string">
            <text:p>Tanque de almacenamiento</text:p>
          </table:table-cell>
          <table:table-cell table:style-name="ce59" table:formula="of:=+[$'Inversión inicial'.F15]" office:value-type="float" office:value="28813.5593220339" calcext:value-type="float">
            <text:p>28,813.56</text:p>
          </table:table-cell>
          <table:table-cell table:style-name="ce202" table:formula="of:=1/[.E13]" office:value-type="float" office:value="10" calcext:value-type="float">
            <text:p>10</text:p>
          </table:table-cell>
          <table:table-cell table:style-name="ce203" office:value-type="percentage" office:value="0.1" calcext:value-type="percentage">
            <text:p>10 %</text:p>
          </table:table-cell>
          <table:table-cell table:style-name="ce67" table:formula="of:=+[.C13]*[.E13]" office:value-type="float" office:value="2881.35593220339" calcext:value-type="float">
            <text:p>2881.36</text:p>
          </table:table-cell>
          <table:table-cell table:style-name="ce67" table:formula="of:=+[.F13]*[.$H$2]" office:value-type="float" office:value="28813.5593220339" calcext:value-type="float">
            <text:p>28813.56</text:p>
          </table:table-cell>
          <table:table-cell table:style-name="ce67" table:formula="of:=+[.C13]-[.G13]" office:value-type="float" office:value="0" calcext:value-type="float">
            <text:p>0.00</text:p>
          </table:table-cell>
          <table:table-cell table:number-columns-repeated="16376"/>
        </table:table-row>
        <table:table-row table:style-name="ro1">
          <table:table-cell/>
          <table:table-cell table:style-name="ce23" office:value-type="string" calcext:value-type="string">
            <text:p>Accesorios mecánicos</text:p>
          </table:table-cell>
          <table:table-cell table:style-name="ce59" table:formula="of:=+[$'Inversión inicial'.F16]" office:value-type="float" office:value="8898.30508474576" calcext:value-type="float">
            <text:p>8,898.31</text:p>
          </table:table-cell>
          <table:table-cell table:style-name="ce202" table:formula="of:=1/[.E14]" office:value-type="float" office:value="10" calcext:value-type="float">
            <text:p>10</text:p>
          </table:table-cell>
          <table:table-cell table:style-name="ce203" office:value-type="percentage" office:value="0.1" calcext:value-type="percentage">
            <text:p>10 %</text:p>
          </table:table-cell>
          <table:table-cell table:style-name="ce67" table:formula="of:=+[.C14]*[.E14]" office:value-type="float" office:value="889.830508474576" calcext:value-type="float">
            <text:p>889.83</text:p>
          </table:table-cell>
          <table:table-cell table:style-name="ce67" table:formula="of:=+[.F14]*[.$H$2]" office:value-type="float" office:value="8898.30508474576" calcext:value-type="float">
            <text:p>8898.31</text:p>
          </table:table-cell>
          <table:table-cell table:style-name="ce67" table:formula="of:=+[.C14]-[.G14]" office:value-type="float" office:value="0" calcext:value-type="float">
            <text:p>0.00</text:p>
          </table:table-cell>
          <table:table-cell table:number-columns-repeated="16376"/>
        </table:table-row>
        <table:table-row table:style-name="ro1">
          <table:table-cell/>
          <table:table-cell table:style-name="ce23" office:value-type="string" calcext:value-type="string">
            <text:p>Dispensador de CL</text:p>
          </table:table-cell>
          <table:table-cell table:style-name="ce59" table:formula="of:=+[$'Inversión inicial'.F17]" office:value-type="float" office:value="40677.9661016949" calcext:value-type="float">
            <text:p>40,677.97</text:p>
          </table:table-cell>
          <table:table-cell table:style-name="ce202" table:formula="of:=1/[.E15]" office:value-type="float" office:value="10" calcext:value-type="float">
            <text:p>10</text:p>
          </table:table-cell>
          <table:table-cell table:style-name="ce203" office:value-type="percentage" office:value="0.1" calcext:value-type="percentage">
            <text:p>10 %</text:p>
          </table:table-cell>
          <table:table-cell table:style-name="ce67" table:formula="of:=+[.C15]*[.E15]" office:value-type="float" office:value="4067.79661016949" calcext:value-type="float">
            <text:p>4067.80</text:p>
          </table:table-cell>
          <table:table-cell table:style-name="ce67" table:formula="of:=+[.F15]*[.$H$2]" office:value-type="float" office:value="40677.9661016949" calcext:value-type="float">
            <text:p>40677.97</text:p>
          </table:table-cell>
          <table:table-cell table:style-name="ce67" table:formula="of:=+[.C15]-[.G15]" office:value-type="float" office:value="0" calcext:value-type="float">
            <text:p>0.00</text:p>
          </table:table-cell>
          <table:table-cell table:number-columns-repeated="16376"/>
        </table:table-row>
        <table:table-row table:style-name="ro1">
          <table:table-cell/>
          <table:table-cell table:style-name="ce23" office:value-type="string" calcext:value-type="string">
            <text:p>Bomba CL</text:p>
          </table:table-cell>
          <table:table-cell table:style-name="ce59" table:formula="of:=+[$'Inversión inicial'.F18]" office:value-type="float" office:value="13350.4322033898" calcext:value-type="float">
            <text:p>13,350.43</text:p>
          </table:table-cell>
          <table:table-cell table:style-name="ce202" table:formula="of:=1/[.E16]" office:value-type="float" office:value="10" calcext:value-type="float">
            <text:p>10</text:p>
          </table:table-cell>
          <table:table-cell table:style-name="ce203" office:value-type="percentage" office:value="0.1" calcext:value-type="percentage">
            <text:p>10 %</text:p>
          </table:table-cell>
          <table:table-cell table:style-name="ce67" table:formula="of:=+[.C16]*[.E16]" office:value-type="float" office:value="1335.04322033898" calcext:value-type="float">
            <text:p>1335.04</text:p>
          </table:table-cell>
          <table:table-cell table:style-name="ce67" table:formula="of:=+[.F16]*[.$H$2]" office:value-type="float" office:value="13350.4322033898" calcext:value-type="float">
            <text:p>13350.43</text:p>
          </table:table-cell>
          <table:table-cell table:style-name="ce67" table:formula="of:=+[.C16]-[.G16]" office:value-type="float" office:value="0" calcext:value-type="float">
            <text:p>0.00</text:p>
          </table:table-cell>
          <table:table-cell table:number-columns-repeated="16376"/>
        </table:table-row>
        <table:table-row table:style-name="ro1">
          <table:table-cell/>
          <table:table-cell table:style-name="ce23" office:value-type="string" calcext:value-type="string">
            <text:p>Equipos de seguridad</text:p>
          </table:table-cell>
          <table:table-cell table:style-name="ce59" table:formula="of:=+[$'Inversión inicial'.F19]" office:value-type="float" office:value="423.728813559322" calcext:value-type="float">
            <text:p>423.73</text:p>
          </table:table-cell>
          <table:table-cell table:style-name="ce202" table:formula="of:=1/[.E17]" office:value-type="float" office:value="10" calcext:value-type="float">
            <text:p>10</text:p>
          </table:table-cell>
          <table:table-cell table:style-name="ce203" office:value-type="percentage" office:value="0.1" calcext:value-type="percentage">
            <text:p>10 %</text:p>
          </table:table-cell>
          <table:table-cell table:style-name="ce67" table:formula="of:=+[.C17]*[.E17]" office:value-type="float" office:value="42.3728813559322" calcext:value-type="float">
            <text:p>42.37</text:p>
          </table:table-cell>
          <table:table-cell table:style-name="ce67" table:formula="of:=+[.F17]*[.$H$2]" office:value-type="float" office:value="423.728813559322" calcext:value-type="float">
            <text:p>423.73</text:p>
          </table:table-cell>
          <table:table-cell table:style-name="ce67" table:formula="of:=+[.C17]-[.G17]" office:value-type="float" office:value="0" calcext:value-type="float">
            <text:p>0.00</text:p>
          </table:table-cell>
          <table:table-cell table:number-columns-repeated="16376"/>
        </table:table-row>
        <table:table-row table:style-name="ro1">
          <table:table-cell/>
          <table:table-cell table:style-name="ce23" office:value-type="string" calcext:value-type="string">
            <text:p>Consola</text:p>
          </table:table-cell>
          <table:table-cell table:style-name="ce59" table:formula="of:=+[$'Inversión inicial'.F20]" office:value-type="float" office:value="847.457627118644" calcext:value-type="float">
            <text:p>847.46</text:p>
          </table:table-cell>
          <table:table-cell table:style-name="ce202" table:formula="of:=1/[.E18]" office:value-type="float" office:value="10" calcext:value-type="float">
            <text:p>10</text:p>
          </table:table-cell>
          <table:table-cell table:style-name="ce203" office:value-type="percentage" office:value="0.1" calcext:value-type="percentage">
            <text:p>10 %</text:p>
          </table:table-cell>
          <table:table-cell table:style-name="ce67" table:formula="of:=+[.C18]*[.E18]" office:value-type="float" office:value="84.7457627118644" calcext:value-type="float">
            <text:p>84.75</text:p>
          </table:table-cell>
          <table:table-cell table:style-name="ce67" table:formula="of:=+[.F18]*[.$H$2]" office:value-type="float" office:value="847.457627118644" calcext:value-type="float">
            <text:p>847.46</text:p>
          </table:table-cell>
          <table:table-cell table:style-name="ce67" table:formula="of:=+[.C18]-[.G18]" office:value-type="float" office:value="0" calcext:value-type="float">
            <text:p>0.00</text:p>
          </table:table-cell>
          <table:table-cell table:number-columns-repeated="16376"/>
        </table:table-row>
        <table:table-row table:style-name="ro1">
          <table:table-cell/>
          <table:table-cell table:style-name="ce23" office:value-type="string" calcext:value-type="string">
            <text:p>Gata lagarto</text:p>
          </table:table-cell>
          <table:table-cell table:style-name="ce59" table:formula="of:=+[$'Inversión inicial'.F21]" office:value-type="float" office:value="1271.18644067797" calcext:value-type="float">
            <text:p>1,271.19</text:p>
          </table:table-cell>
          <table:table-cell table:style-name="ce202" table:formula="of:=1/[.E19]" office:value-type="float" office:value="10" calcext:value-type="float">
            <text:p>10</text:p>
          </table:table-cell>
          <table:table-cell table:style-name="ce203" office:value-type="percentage" office:value="0.1" calcext:value-type="percentage">
            <text:p>10 %</text:p>
          </table:table-cell>
          <table:table-cell table:style-name="ce67" table:formula="of:=+[.C19]*[.E19]" office:value-type="float" office:value="127.118644067797" calcext:value-type="float">
            <text:p>127.12</text:p>
          </table:table-cell>
          <table:table-cell table:style-name="ce67" table:formula="of:=+[.F19]*[.$H$2]" office:value-type="float" office:value="1271.18644067797" calcext:value-type="float">
            <text:p>1271.19</text:p>
          </table:table-cell>
          <table:table-cell table:style-name="ce67" table:formula="of:=+[.C19]-[.G19]" office:value-type="float" office:value="0" calcext:value-type="float">
            <text:p>0.00</text:p>
          </table:table-cell>
          <table:table-cell table:number-columns-repeated="16376"/>
        </table:table-row>
        <table:table-row table:style-name="ro1">
          <table:table-cell/>
          <table:table-cell table:style-name="ce23" office:value-type="string" calcext:value-type="string">
            <text:p>Máquina desllantadora</text:p>
          </table:table-cell>
          <table:table-cell table:style-name="ce59" table:formula="of:=+[$'Inversión inicial'.F22]" office:value-type="float" office:value="4237.28813559322" calcext:value-type="float">
            <text:p>4,237.29</text:p>
          </table:table-cell>
          <table:table-cell table:style-name="ce202" table:formula="of:=1/[.E20]" office:value-type="float" office:value="10" calcext:value-type="float">
            <text:p>10</text:p>
          </table:table-cell>
          <table:table-cell table:style-name="ce203" office:value-type="percentage" office:value="0.1" calcext:value-type="percentage">
            <text:p>10 %</text:p>
          </table:table-cell>
          <table:table-cell table:style-name="ce67" table:formula="of:=+[.C20]*[.E20]" office:value-type="float" office:value="423.728813559322" calcext:value-type="float">
            <text:p>423.73</text:p>
          </table:table-cell>
          <table:table-cell table:style-name="ce67" table:formula="of:=+[.F20]*[.$H$2]" office:value-type="float" office:value="4237.28813559322" calcext:value-type="float">
            <text:p>4237.29</text:p>
          </table:table-cell>
          <table:table-cell table:style-name="ce67" table:formula="of:=+[.C20]-[.G20]" office:value-type="float" office:value="0" calcext:value-type="float">
            <text:p>0.00</text:p>
          </table:table-cell>
          <table:table-cell table:number-columns-repeated="16376"/>
        </table:table-row>
        <table:table-row table:style-name="ro1">
          <table:table-cell/>
          <table:table-cell table:style-name="ce23" office:value-type="string" calcext:value-type="string">
            <text:p>Compresora</text:p>
          </table:table-cell>
          <table:table-cell table:style-name="ce59" table:formula="of:=+[$'Inversión inicial'.F23]" office:value-type="float" office:value="6779.66101694915" calcext:value-type="float">
            <text:p>6,779.66</text:p>
          </table:table-cell>
          <table:table-cell table:style-name="ce202" table:formula="of:=1/[.E21]" office:value-type="float" office:value="10" calcext:value-type="float">
            <text:p>10</text:p>
          </table:table-cell>
          <table:table-cell table:style-name="ce203" office:value-type="percentage" office:value="0.1" calcext:value-type="percentage">
            <text:p>10 %</text:p>
          </table:table-cell>
          <table:table-cell table:style-name="ce67" table:formula="of:=+[.C21]*[.E21]" office:value-type="float" office:value="677.966101694915" calcext:value-type="float">
            <text:p>677.97</text:p>
          </table:table-cell>
          <table:table-cell table:style-name="ce67" table:formula="of:=+[.F21]*[.$H$2]" office:value-type="float" office:value="6779.66101694915" calcext:value-type="float">
            <text:p>6779.66</text:p>
          </table:table-cell>
          <table:table-cell table:style-name="ce67" table:formula="of:=+[.C21]-[.G21]" office:value-type="float" office:value="0" calcext:value-type="float">
            <text:p>0.00</text:p>
          </table:table-cell>
          <table:table-cell table:number-columns-repeated="16376"/>
        </table:table-row>
        <table:table-row table:style-name="ro1">
          <table:table-cell/>
          <table:table-cell table:style-name="ce23" office:value-type="string" calcext:value-type="string">
            <text:p>Juego de llaves</text:p>
          </table:table-cell>
          <table:table-cell table:style-name="ce59" table:formula="of:=+[$'Inversión inicial'.F24]" office:value-type="float" office:value="1694.91525423729" calcext:value-type="float">
            <text:p>1,694.92</text:p>
          </table:table-cell>
          <table:table-cell table:style-name="ce202" table:formula="of:=1/[.E22]" office:value-type="float" office:value="10" calcext:value-type="float">
            <text:p>10</text:p>
          </table:table-cell>
          <table:table-cell table:style-name="ce203" office:value-type="percentage" office:value="0.1" calcext:value-type="percentage">
            <text:p>10 %</text:p>
          </table:table-cell>
          <table:table-cell table:style-name="ce67" table:formula="of:=+[.C22]*[.E22]" office:value-type="float" office:value="169.491525423729" calcext:value-type="float">
            <text:p>169.49</text:p>
          </table:table-cell>
          <table:table-cell table:style-name="ce67" table:formula="of:=+[.F22]*[.$H$2]" office:value-type="float" office:value="1694.91525423729" calcext:value-type="float">
            <text:p>1694.92</text:p>
          </table:table-cell>
          <table:table-cell table:style-name="ce67" table:formula="of:=+[.C22]-[.G22]" office:value-type="float" office:value="0" calcext:value-type="float">
            <text:p>0.00</text:p>
          </table:table-cell>
          <table:table-cell table:number-columns-repeated="16376"/>
        </table:table-row>
        <table:table-row table:style-name="ro1">
          <table:table-cell/>
          <table:table-cell table:style-name="ce23" office:value-type="string" calcext:value-type="string">
            <text:p>Equipos informáticos</text:p>
          </table:table-cell>
          <table:table-cell table:style-name="ce59" table:formula="of:=+[$'Inversión inicial'.F25]" office:value-type="float" office:value="2711.86440677966" calcext:value-type="float">
            <text:p>2,711.86</text:p>
          </table:table-cell>
          <table:table-cell table:style-name="ce202" table:formula="of:=1/[.E23]" office:value-type="float" office:value="4" calcext:value-type="float">
            <text:p>4</text:p>
          </table:table-cell>
          <table:table-cell table:style-name="ce203" office:value-type="percentage" office:value="0.25" calcext:value-type="percentage">
            <text:p>25 %</text:p>
          </table:table-cell>
          <table:table-cell table:style-name="ce67" table:formula="of:=+[.C23]*[.E23]" office:value-type="float" office:value="677.966101694915" calcext:value-type="float">
            <text:p>677.97</text:p>
          </table:table-cell>
          <table:table-cell table:style-name="ce67" table:formula="of:=+[.F23]*2" office:value-type="float" office:value="1355.93220338983" calcext:value-type="float">
            <text:p>1355.93</text:p>
          </table:table-cell>
          <table:table-cell table:style-name="ce67" table:formula="of:=+[.C23]-[.G23]" office:value-type="float" office:value="1355.93220338983" calcext:value-type="float">
            <text:p>1355.93</text:p>
          </table:table-cell>
          <table:table-cell table:number-columns-repeated="16376"/>
        </table:table-row>
        <table:table-row table:style-name="ro1">
          <table:table-cell/>
          <table:table-cell table:style-name="ce199" office:value-type="string" calcext:value-type="string">
            <text:p>Total</text:p>
          </table:table-cell>
          <table:table-cell table:style-name="ce201" table:formula="of:=SUM([.C7:.C23])" office:value-type="float" office:value="750225.069007264" calcext:value-type="float">
            <text:p>750,225.07</text:p>
          </table:table-cell>
          <table:table-cell table:style-name="ce199" table:number-columns-repeated="2"/>
          <table:table-cell table:style-name="ce199" office:value-type="float" office:value="34666.5746973366" calcext:value-type="float">
            <text:p>34666.5746973366</text:p>
          </table:table-cell>
          <table:table-cell table:style-name="ce199"/>
          <table:table-cell table:style-name="ce199" office:value-type="float" office:value="408983.050847458" calcext:value-type="float">
            <text:p>408983.050847458</text:p>
          </table:table-cell>
          <table:table-cell table:number-columns-repeated="16376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esupuesto de ventas" table:style-name="ta7">
        <table:table-column table:style-name="co5" table:default-cell-style-name="ce205"/>
        <table:table-column table:style-name="co24" table:default-cell-style-name="ce205"/>
        <table:table-column table:style-name="co19" table:number-columns-repeated="8" table:default-cell-style-name="ce205"/>
        <table:table-column table:style-name="co25" table:number-columns-repeated="12" table:default-cell-style-name="ce205"/>
        <table:table-column table:style-name="co4" table:number-columns-repeated="16362" table:default-cell-style-name="ce205"/>
        <table:table-row table:style-name="ro8" table:number-rows-repeated="2">
          <table:table-cell table:number-columns-repeated="16384"/>
        </table:table-row>
        <table:table-row table:style-name="ro8">
          <table:table-cell/>
          <table:table-cell table:style-name="ce206"/>
          <table:table-cell table:style-name="ce206" office:value-type="string" calcext:value-type="string">
            <text:p>ene</text:p>
          </table:table-cell>
          <table:table-cell table:style-name="ce206" office:value-type="string" calcext:value-type="string">
            <text:p>feb</text:p>
          </table:table-cell>
          <table:table-cell table:style-name="ce206" office:value-type="string" calcext:value-type="string">
            <text:p>mar</text:p>
          </table:table-cell>
          <table:table-cell table:style-name="ce206" office:value-type="string" calcext:value-type="string">
            <text:p>abr</text:p>
          </table:table-cell>
          <table:table-cell table:style-name="ce206" office:value-type="string" calcext:value-type="string">
            <text:p>may</text:p>
          </table:table-cell>
          <table:table-cell table:style-name="ce206" office:value-type="string" calcext:value-type="string">
            <text:p>jun</text:p>
          </table:table-cell>
          <table:table-cell table:style-name="ce206" office:value-type="string" calcext:value-type="string">
            <text:p>jul</text:p>
          </table:table-cell>
          <table:table-cell table:style-name="ce206" office:value-type="string" calcext:value-type="string">
            <text:p>ago</text:p>
          </table:table-cell>
          <table:table-cell table:style-name="ce206" office:value-type="string" calcext:value-type="string">
            <text:p>set</text:p>
          </table:table-cell>
          <table:table-cell table:style-name="ce206" office:value-type="string" calcext:value-type="string">
            <text:p>oct</text:p>
          </table:table-cell>
          <table:table-cell table:style-name="ce206" office:value-type="string" calcext:value-type="string">
            <text:p>nov</text:p>
          </table:table-cell>
          <table:table-cell table:style-name="ce206" office:value-type="string" calcext:value-type="string">
            <text:p>dic</text:p>
          </table:table-cell>
          <table:table-cell table:style-name="ce221" office:value-type="string" calcext:value-type="string">
            <text:p>anual</text:p>
          </table:table-cell>
          <table:table-cell table:number-columns-repeated="16369"/>
        </table:table-row>
        <table:table-row table:style-name="ro8">
          <table:table-cell/>
          <table:table-cell table:style-name="ce206" office:value-type="string" calcext:value-type="string">
            <text:p>% ventas/mes</text:p>
          </table:table-cell>
          <table:table-cell table:style-name="ce214" office:value-type="percentage" office:value="0.0703318250377074" calcext:value-type="percentage">
            <text:p>7 %</text:p>
          </table:table-cell>
          <table:table-cell table:style-name="ce219" office:value-type="percentage" office:value="0.0710021786492375" calcext:value-type="percentage">
            <text:p>7.1%</text:p>
          </table:table-cell>
          <table:table-cell table:style-name="ce219" office:value-type="percentage" office:value="0.0720077090665326" calcext:value-type="percentage">
            <text:p>7.2%</text:p>
          </table:table-cell>
          <table:table-cell table:style-name="ce219" office:value-type="percentage" office:value="0.0720353611530082" calcext:value-type="percentage">
            <text:p>7.2%</text:p>
          </table:table-cell>
          <table:table-cell table:style-name="ce219" office:value-type="percentage" office:value="0.0710353611530082" calcext:value-type="percentage">
            <text:p>7.1%</text:p>
          </table:table-cell>
          <table:table-cell table:style-name="ce219" office:value-type="percentage" office:value="0.069859477124183" calcext:value-type="percentage">
            <text:p>7.0%</text:p>
          </table:table-cell>
          <table:table-cell table:style-name="ce219" office:value-type="percentage" office:value="0.127367186190716" calcext:value-type="percentage">
            <text:p>12.7%</text:p>
          </table:table-cell>
          <table:table-cell table:style-name="ce219" office:value-type="percentage" office:value="0.0754700854700855" calcext:value-type="percentage">
            <text:p>7.5%</text:p>
          </table:table-cell>
          <table:table-cell table:style-name="ce219" office:value-type="percentage" office:value="0.0764756158873806" calcext:value-type="percentage">
            <text:p>7.6%</text:p>
          </table:table-cell>
          <table:table-cell table:style-name="ce219" office:value-type="percentage" office:value="0.0766432042902631" calcext:value-type="percentage">
            <text:p>7.7%</text:p>
          </table:table-cell>
          <table:table-cell table:style-name="ce219" office:value-type="percentage" office:value="0.0837012736718618" calcext:value-type="percentage">
            <text:p>8.4%</text:p>
          </table:table-cell>
          <table:table-cell table:style-name="ce219" office:value-type="percentage" office:value="0.134070722306016" calcext:value-type="percentage">
            <text:p>13.4%</text:p>
          </table:table-cell>
          <table:table-cell table:style-name="ce226" office:value-type="percentage" office:value="1" calcext:value-type="percentage">
            <text:p>100.0%</text:p>
          </table:table-cell>
          <table:table-cell table:number-columns-repeated="16369"/>
        </table:table-row>
        <table:table-row table:style-name="ro8">
          <table:table-cell table:number-columns-repeated="15"/>
          <table:table-cell table:style-name="ce230"/>
          <table:table-cell table:number-columns-repeated="16368"/>
        </table:table-row>
        <table:table-row table:style-name="ro8">
          <table:table-cell/>
          <table:table-cell office:value-type="string" calcext:value-type="string">
            <text:p>tasa de crecimiento</text:p>
          </table:table-cell>
          <table:table-cell/>
          <table:table-cell table:style-name="ce220" table:formula="of:=+[$Resumen.F7]" office:value-type="percentage" office:value="0.07" calcext:value-type="percentage">
            <text:p>7 %</text:p>
          </table:table-cell>
          <table:table-cell table:number-columns-repeated="16380"/>
        </table:table-row>
        <table:table-row table:style-name="ro8" table:number-rows-repeated="3">
          <table:table-cell table:number-columns-repeated="16384"/>
        </table:table-row>
        <table:table-row table:style-name="ro8">
          <table:table-cell/>
          <table:table-cell table:style-name="ce207" office:value-type="string" calcext:value-type="string" table:number-columns-spanned="14" table:number-rows-spanned="1">
            <text:p>Proyeccion de ventas en galones DIESEL B5 S50</text:p>
          </table:table-cell>
          <table:covered-table-cell table:number-columns-repeated="13" table:style-name="ce215"/>
          <table:table-cell table:number-columns-repeated="16369"/>
        </table:table-row>
        <table:table-row table:style-name="ro8">
          <table:table-cell table:number-columns-repeated="16"/>
          <table:table-cell table:style-name="ce213" office:value-type="string" calcext:value-type="string" table:number-columns-spanned="14" table:number-rows-spanned="1">
            <text:p>Proyeccion de ventas en soles DIESEL B5 S50</text:p>
          </table:table-cell>
          <table:covered-table-cell table:number-columns-repeated="13" table:style-name="ce213"/>
          <table:table-cell table:number-columns-repeated="16354"/>
        </table:table-row>
        <table:table-row table:style-name="ro8">
          <table:table-cell/>
          <table:table-cell table:style-name="ce208" office:value-type="string" calcext:value-type="string">
            <text:p>Año</text:p>
          </table:table-cell>
          <table:table-cell table:style-name="ce208" office:value-type="string" calcext:value-type="string">
            <text:p>Mes 1</text:p>
          </table:table-cell>
          <table:table-cell table:style-name="ce208" office:value-type="string" calcext:value-type="string">
            <text:p>Mes 2</text:p>
          </table:table-cell>
          <table:table-cell table:style-name="ce208" office:value-type="string" calcext:value-type="string">
            <text:p>Mes 3</text:p>
          </table:table-cell>
          <table:table-cell table:style-name="ce208" office:value-type="string" calcext:value-type="string">
            <text:p>Mes 4</text:p>
          </table:table-cell>
          <table:table-cell table:style-name="ce208" office:value-type="string" calcext:value-type="string">
            <text:p>Mes 5</text:p>
          </table:table-cell>
          <table:table-cell table:style-name="ce208" office:value-type="string" calcext:value-type="string">
            <text:p>Mes 6</text:p>
          </table:table-cell>
          <table:table-cell table:style-name="ce208" office:value-type="string" calcext:value-type="string">
            <text:p>Mes 7</text:p>
          </table:table-cell>
          <table:table-cell table:style-name="ce208" office:value-type="string" calcext:value-type="string">
            <text:p>Mes 8</text:p>
          </table:table-cell>
          <table:table-cell table:style-name="ce208" office:value-type="string" calcext:value-type="string">
            <text:p>Mes 9</text:p>
          </table:table-cell>
          <table:table-cell table:style-name="ce208" office:value-type="string" calcext:value-type="string">
            <text:p>Mes 10</text:p>
          </table:table-cell>
          <table:table-cell table:style-name="ce208" office:value-type="string" calcext:value-type="string">
            <text:p>Mes 11</text:p>
          </table:table-cell>
          <table:table-cell table:style-name="ce208" office:value-type="string" calcext:value-type="string">
            <text:p>Mes 12</text:p>
          </table:table-cell>
          <table:table-cell table:style-name="ce208" office:value-type="string" calcext:value-type="string">
            <text:p>TOTAL</text:p>
          </table:table-cell>
          <table:table-cell/>
          <table:table-cell table:style-name="ce208" office:value-type="string" calcext:value-type="string">
            <text:p>Año</text:p>
          </table:table-cell>
          <table:table-cell table:style-name="ce208" office:value-type="string" calcext:value-type="string">
            <text:p>Mes 1</text:p>
          </table:table-cell>
          <table:table-cell table:style-name="ce208" office:value-type="string" calcext:value-type="string">
            <text:p>Mes 2</text:p>
          </table:table-cell>
          <table:table-cell table:style-name="ce208" office:value-type="string" calcext:value-type="string">
            <text:p>Mes 3</text:p>
          </table:table-cell>
          <table:table-cell table:style-name="ce208" office:value-type="string" calcext:value-type="string">
            <text:p>Mes 4</text:p>
          </table:table-cell>
          <table:table-cell table:style-name="ce208" office:value-type="string" calcext:value-type="string">
            <text:p>Mes 5</text:p>
          </table:table-cell>
          <table:table-cell table:style-name="ce208" office:value-type="string" calcext:value-type="string">
            <text:p>Mes 6</text:p>
          </table:table-cell>
          <table:table-cell table:style-name="ce208" office:value-type="string" calcext:value-type="string">
            <text:p>Mes 7</text:p>
          </table:table-cell>
          <table:table-cell table:style-name="ce208" office:value-type="string" calcext:value-type="string">
            <text:p>Mes 8</text:p>
          </table:table-cell>
          <table:table-cell table:style-name="ce208" office:value-type="string" calcext:value-type="string">
            <text:p>Mes 9</text:p>
          </table:table-cell>
          <table:table-cell table:style-name="ce208" office:value-type="string" calcext:value-type="string">
            <text:p>Mes 10</text:p>
          </table:table-cell>
          <table:table-cell table:style-name="ce208" office:value-type="string" calcext:value-type="string">
            <text:p>Mes 11</text:p>
          </table:table-cell>
          <table:table-cell table:style-name="ce208" office:value-type="string" calcext:value-type="string">
            <text:p>Mes 12</text:p>
          </table:table-cell>
          <table:table-cell table:style-name="ce208" office:value-type="string" calcext:value-type="string">
            <text:p>TOTAL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1" calcext:value-type="float">
            <text:p>1</text:p>
          </table:table-cell>
          <table:table-cell table:style-name="ce216" table:formula="of:=+[.$O$13]*[.C4]" office:value-type="float" office:value="4219.90950226244" calcext:value-type="float">
            <text:p>4,220</text:p>
          </table:table-cell>
          <table:table-cell table:style-name="ce216" table:formula="of:=+[.$O$13]*[.D4]" office:value-type="float" office:value="4260.13071895425" calcext:value-type="float">
            <text:p>4,260</text:p>
          </table:table-cell>
          <table:table-cell table:style-name="ce216" table:formula="of:=+[.$O$13]*[.E4]" office:value-type="float" office:value="4320.46254399196" calcext:value-type="float">
            <text:p>4,320</text:p>
          </table:table-cell>
          <table:table-cell table:style-name="ce216" table:formula="of:=+[.$O$13]*[.F4]" office:value-type="float" office:value="4322.12166918049" calcext:value-type="float">
            <text:p>4,322</text:p>
          </table:table-cell>
          <table:table-cell table:style-name="ce216" table:formula="of:=+[.$O$13]*[.G4]" office:value-type="float" office:value="4262.12166918049" calcext:value-type="float">
            <text:p>4,262</text:p>
          </table:table-cell>
          <table:table-cell table:style-name="ce216" table:formula="of:=+[.$O$13]*[.H4]" office:value-type="float" office:value="4191.56862745098" calcext:value-type="float">
            <text:p>4,192</text:p>
          </table:table-cell>
          <table:table-cell table:style-name="ce216" table:formula="of:=+[.$O$13]*[.I4]" office:value-type="float" office:value="7642.03117144294" calcext:value-type="float">
            <text:p>7,642</text:p>
          </table:table-cell>
          <table:table-cell table:style-name="ce216" table:formula="of:=+[.$O$13]*[.J4]" office:value-type="float" office:value="4528.20512820513" calcext:value-type="float">
            <text:p>4,528</text:p>
          </table:table-cell>
          <table:table-cell table:style-name="ce216" table:formula="of:=+[.$O$13]*[.K4]" office:value-type="float" office:value="4588.53695324284" calcext:value-type="float">
            <text:p>4,589</text:p>
          </table:table-cell>
          <table:table-cell table:style-name="ce216" table:formula="of:=+[.$O$13]*[.L4]" office:value-type="float" office:value="4598.59225741579" calcext:value-type="float">
            <text:p>4,599</text:p>
          </table:table-cell>
          <table:table-cell table:style-name="ce216" table:formula="of:=+[.$O$13]*[.M4]" office:value-type="float" office:value="5022.07642031171" calcext:value-type="float">
            <text:p>5,022</text:p>
          </table:table-cell>
          <table:table-cell table:style-name="ce216" table:formula="of:=+[.$O$13]*[.N4]" office:value-type="float" office:value="8044.24333836099" calcext:value-type="float">
            <text:p>8,044</text:p>
          </table:table-cell>
          <table:table-cell table:style-name="ce227" office:value-type="float" office:value="60000" calcext:value-type="float">
            <text:p>60,000</text:p>
          </table:table-cell>
          <table:table-cell/>
          <table:table-cell table:style-name="ce206" office:value-type="float" office:value="1" calcext:value-type="float">
            <text:p>1</text:p>
          </table:table-cell>
          <table:table-cell table:style-name="ce232" table:formula="of:=+[.C13]*[$Resumen.$C$4]" office:value-type="float" office:value="46454.7664698213" calcext:value-type="float">
            <text:p>46455</text:p>
          </table:table-cell>
          <table:table-cell table:style-name="ce232" table:formula="of:=+[.D13]*[$Resumen.$C$4]" office:value-type="float" office:value="46897.5407111998" calcext:value-type="float">
            <text:p>46898</text:p>
          </table:table-cell>
          <table:table-cell table:style-name="ce232" table:formula="of:=+[.E13]*[$Resumen.$C$4]" office:value-type="float" office:value="47561.7020732674" calcext:value-type="float">
            <text:p>47562</text:p>
          </table:table-cell>
          <table:table-cell table:style-name="ce232" table:formula="of:=+[.F13]*[$Resumen.$C$4]" office:value-type="float" office:value="47579.9665107242" calcext:value-type="float">
            <text:p>47580</text:p>
          </table:table-cell>
          <table:table-cell table:style-name="ce232" table:formula="of:=+[.G13]*[$Resumen.$C$4]" office:value-type="float" office:value="46919.458036148" calcext:value-type="float">
            <text:p>46919</text:p>
          </table:table-cell>
          <table:table-cell table:style-name="ce232" table:formula="of:=+[.H13]*[$Resumen.$C$4]" office:value-type="float" office:value="46142.77666999" calcext:value-type="float">
            <text:p>46143</text:p>
          </table:table-cell>
          <table:table-cell table:style-name="ce232" table:formula="of:=+[.I13]*[$Resumen.$C$4]" office:value-type="float" office:value="84127.1058619015" calcext:value-type="float">
            <text:p>84127</text:p>
          </table:table-cell>
          <table:table-cell table:style-name="ce232" table:formula="of:=+[.J13]*[$Resumen.$C$4]" office:value-type="float" office:value="49848.631029987" calcext:value-type="float">
            <text:p>49849</text:p>
          </table:table-cell>
          <table:table-cell table:style-name="ce232" table:formula="of:=+[.K13]*[$Resumen.$C$4]" office:value-type="float" office:value="50512.7923920546" calcext:value-type="float">
            <text:p>50513</text:p>
          </table:table-cell>
          <table:table-cell table:style-name="ce232" table:formula="of:=+[.L13]*[$Resumen.$C$4]" office:value-type="float" office:value="50623.4859523992" calcext:value-type="float">
            <text:p>50623</text:p>
          </table:table-cell>
          <table:table-cell table:style-name="ce232" table:formula="of:=+[.M13]*[$Resumen.$C$4]" office:value-type="float" office:value="55285.4005930925" calcext:value-type="float">
            <text:p>55285</text:p>
          </table:table-cell>
          <table:table-cell table:style-name="ce232" table:formula="of:=+[.N13]*[$Resumen.$C$4]" office:value-type="float" office:value="88554.8482756858" calcext:value-type="float">
            <text:p>88555</text:p>
          </table:table-cell>
          <table:table-cell table:style-name="ce234" table:formula="of:=SUM([.R13:.AC13])" office:value-type="float" office:value="660508.474576271" calcext:value-type="float">
            <text:p>660508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2" calcext:value-type="float">
            <text:p>2</text:p>
          </table:table-cell>
          <table:table-cell table:style-name="ce216" table:formula="of:=+[.$O$14]*[.C4]" office:value-type="float" office:value="4571.56862745098" calcext:value-type="float">
            <text:p>4,572</text:p>
          </table:table-cell>
          <table:table-cell table:style-name="ce216" table:formula="of:=+[.$O$14]*[.D4]" office:value-type="float" office:value="4615.14161220044" calcext:value-type="float">
            <text:p>4,615</text:p>
          </table:table-cell>
          <table:table-cell table:style-name="ce216" table:formula="of:=+[.$O$14]*[.E4]" office:value-type="float" office:value="4680.50108932462" calcext:value-type="float">
            <text:p>4,681</text:p>
          </table:table-cell>
          <table:table-cell table:style-name="ce216" table:formula="of:=+[.$O$14]*[.F4]" office:value-type="float" office:value="4682.29847494553" calcext:value-type="float">
            <text:p>4,682</text:p>
          </table:table-cell>
          <table:table-cell table:style-name="ce216" table:formula="of:=+[.$O$14]*[.G4]" office:value-type="float" office:value="4617.29847494553" calcext:value-type="float">
            <text:p>4,617</text:p>
          </table:table-cell>
          <table:table-cell table:style-name="ce216" table:formula="of:=+[.$O$14]*[.H4]" office:value-type="float" office:value="4540.8660130719" calcext:value-type="float">
            <text:p>4,541</text:p>
          </table:table-cell>
          <table:table-cell table:style-name="ce216" table:formula="of:=+[.$O$14]*[.I4]" office:value-type="float" office:value="8278.86710239651" calcext:value-type="float">
            <text:p>8,279</text:p>
          </table:table-cell>
          <table:table-cell table:style-name="ce216" table:formula="of:=+[.$O$14]*[.J4]" office:value-type="float" office:value="4905.55555555556" calcext:value-type="float">
            <text:p>4,906</text:p>
          </table:table-cell>
          <table:table-cell table:style-name="ce216" table:formula="of:=+[.$O$14]*[.K4]" office:value-type="float" office:value="4970.91503267974" calcext:value-type="float">
            <text:p>4,971</text:p>
          </table:table-cell>
          <table:table-cell table:style-name="ce216" table:formula="of:=+[.$O$14]*[.L4]" office:value-type="float" office:value="4981.8082788671" calcext:value-type="float">
            <text:p>4,982</text:p>
          </table:table-cell>
          <table:table-cell table:style-name="ce216" table:formula="of:=+[.$O$14]*[.M4]" office:value-type="float" office:value="5440.58278867102" calcext:value-type="float">
            <text:p>5,441</text:p>
          </table:table-cell>
          <table:table-cell table:style-name="ce216" table:formula="of:=+[.$O$14]*[.N4]" office:value-type="float" office:value="8714.59694989107" calcext:value-type="float">
            <text:p>8,715</text:p>
          </table:table-cell>
          <table:table-cell table:style-name="ce227" office:value-type="float" office:value="65000" calcext:value-type="float">
            <text:p>65,000</text:p>
          </table:table-cell>
          <table:table-cell/>
          <table:table-cell table:style-name="ce206" office:value-type="float" office:value="2" calcext:value-type="float">
            <text:p>2</text:p>
          </table:table-cell>
          <table:table-cell table:style-name="ce232" table:formula="of:=+[.C14]*[$Resumen.$C$4]" office:value-type="float" office:value="50325.9970089731" calcext:value-type="float">
            <text:p>50326</text:p>
          </table:table-cell>
          <table:table-cell table:style-name="ce232" table:formula="of:=+[.D14]*[$Resumen.$C$4]" office:value-type="float" office:value="50805.6691037997" calcext:value-type="float">
            <text:p>50806</text:p>
          </table:table-cell>
          <table:table-cell table:style-name="ce232" table:formula="of:=+[.E14]*[$Resumen.$C$4]" office:value-type="float" office:value="51525.1772460397" calcext:value-type="float">
            <text:p>51525</text:p>
          </table:table-cell>
          <table:table-cell table:style-name="ce232" table:formula="of:=+[.F14]*[$Resumen.$C$4]" office:value-type="float" office:value="51544.9637199513" calcext:value-type="float">
            <text:p>51545</text:p>
          </table:table-cell>
          <table:table-cell table:style-name="ce232" table:formula="of:=+[.G14]*[$Resumen.$C$4]" office:value-type="float" office:value="50829.4128724936" calcext:value-type="float">
            <text:p>50829</text:p>
          </table:table-cell>
          <table:table-cell table:style-name="ce232" table:formula="of:=+[.H14]*[$Resumen.$C$4]" office:value-type="float" office:value="49988.0080591559" calcext:value-type="float">
            <text:p>49988</text:p>
          </table:table-cell>
          <table:table-cell table:style-name="ce232" table:formula="of:=+[.I14]*[$Resumen.$C$4]" office:value-type="float" office:value="91137.6980170599" calcext:value-type="float">
            <text:p>91138</text:p>
          </table:table-cell>
          <table:table-cell table:style-name="ce232" table:formula="of:=+[.J14]*[$Resumen.$C$4]" office:value-type="float" office:value="54002.6836158192" calcext:value-type="float">
            <text:p>54003</text:p>
          </table:table-cell>
          <table:table-cell table:style-name="ce232" table:formula="of:=+[.K14]*[$Resumen.$C$4]" office:value-type="float" office:value="54722.1917580592" calcext:value-type="float">
            <text:p>54722</text:p>
          </table:table-cell>
          <table:table-cell table:style-name="ce232" table:formula="of:=+[.L14]*[$Resumen.$C$4]" office:value-type="float" office:value="54842.1097817658" calcext:value-type="float">
            <text:p>54842</text:p>
          </table:table-cell>
          <table:table-cell table:style-name="ce232" table:formula="of:=+[.M14]*[$Resumen.$C$4]" office:value-type="float" office:value="59892.5173091835" calcext:value-type="float">
            <text:p>59893</text:p>
          </table:table-cell>
          <table:table-cell table:style-name="ce232" table:formula="of:=+[.N14]*[$Resumen.$C$4]" office:value-type="float" office:value="95934.4189653262" calcext:value-type="float">
            <text:p>95934</text:p>
          </table:table-cell>
          <table:table-cell table:style-name="ce234" table:formula="of:=SUM([.R14:.AC14])" office:value-type="float" office:value="715550.847457627" calcext:value-type="float">
            <text:p>715551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3" calcext:value-type="float">
            <text:p>3</text:p>
          </table:table-cell>
          <table:table-cell table:style-name="ce216" table:formula="of:=+[.$O$15]*[.C4]" office:value-type="float" office:value="4891.57843137255" calcext:value-type="float">
            <text:p>4,892</text:p>
          </table:table-cell>
          <table:table-cell table:style-name="ce216" table:formula="of:=+[.$O$15]*[.D4]" office:value-type="float" office:value="4938.20152505447" calcext:value-type="float">
            <text:p>4,938</text:p>
          </table:table-cell>
          <table:table-cell table:style-name="ce216" table:formula="of:=+[.$O$15]*[.E4]" office:value-type="float" office:value="5008.13616557734" calcext:value-type="float">
            <text:p>5,008</text:p>
          </table:table-cell>
          <table:table-cell table:style-name="ce216" table:formula="of:=+[.$O$15]*[.F4]" office:value-type="float" office:value="5010.05936819172" calcext:value-type="float">
            <text:p>5,010</text:p>
          </table:table-cell>
          <table:table-cell table:style-name="ce216" table:formula="of:=+[.$O$15]*[.G4]" office:value-type="float" office:value="4940.50936819172" calcext:value-type="float">
            <text:p>4,941</text:p>
          </table:table-cell>
          <table:table-cell table:style-name="ce216" table:formula="of:=+[.$O$15]*[.H4]" office:value-type="float" office:value="4858.72663398693" calcext:value-type="float">
            <text:p>4,859</text:p>
          </table:table-cell>
          <table:table-cell table:style-name="ce216" table:formula="of:=+[.$O$15]*[.I4]" office:value-type="float" office:value="8858.38779956427" calcext:value-type="float">
            <text:p>8,858</text:p>
          </table:table-cell>
          <table:table-cell table:style-name="ce216" table:formula="of:=+[.$O$15]*[.J4]" office:value-type="float" office:value="5248.94444444445" calcext:value-type="float">
            <text:p>5,249</text:p>
          </table:table-cell>
          <table:table-cell table:style-name="ce216" table:formula="of:=+[.$O$15]*[.K4]" office:value-type="float" office:value="5318.87908496732" calcext:value-type="float">
            <text:p>5,319</text:p>
          </table:table-cell>
          <table:table-cell table:style-name="ce216" table:formula="of:=+[.$O$15]*[.L4]" office:value-type="float" office:value="5330.5348583878" calcext:value-type="float">
            <text:p>5,331</text:p>
          </table:table-cell>
          <table:table-cell table:style-name="ce216" table:formula="of:=+[.$O$15]*[.M4]" office:value-type="float" office:value="5821.42358387799" calcext:value-type="float">
            <text:p>5,821</text:p>
          </table:table-cell>
          <table:table-cell table:style-name="ce216" table:formula="of:=+[.$O$15]*[.N4]" office:value-type="float" office:value="9324.61873638344" calcext:value-type="float">
            <text:p>9,325</text:p>
          </table:table-cell>
          <table:table-cell table:style-name="ce227" table:formula="of:=+[.O14]*(1+[.$D$6])" office:value-type="float" office:value="69550" calcext:value-type="float">
            <text:p>69,550</text:p>
          </table:table-cell>
          <table:table-cell/>
          <table:table-cell table:style-name="ce206" office:value-type="float" office:value="3" calcext:value-type="float">
            <text:p>3</text:p>
          </table:table-cell>
          <table:table-cell table:style-name="ce232" table:formula="of:=+[.C15]*[$Resumen.$C$4]" office:value-type="float" office:value="53848.8167996012" calcext:value-type="float">
            <text:p>53849</text:p>
          </table:table-cell>
          <table:table-cell table:style-name="ce232" table:formula="of:=+[.D15]*[$Resumen.$C$4]" office:value-type="float" office:value="54362.0659410657" calcext:value-type="float">
            <text:p>54362</text:p>
          </table:table-cell>
          <table:table-cell table:style-name="ce232" table:formula="of:=+[.E15]*[$Resumen.$C$4]" office:value-type="float" office:value="55131.9396532624" calcext:value-type="float">
            <text:p>55132</text:p>
          </table:table-cell>
          <table:table-cell table:style-name="ce232" table:formula="of:=+[.F15]*[$Resumen.$C$4]" office:value-type="float" office:value="55153.1111803478" calcext:value-type="float">
            <text:p>55153</text:p>
          </table:table-cell>
          <table:table-cell table:style-name="ce232" table:formula="of:=+[.G15]*[$Resumen.$C$4]" office:value-type="float" office:value="54387.4717735682" calcext:value-type="float">
            <text:p>54387</text:p>
          </table:table-cell>
          <table:table-cell table:style-name="ce232" table:formula="of:=+[.H15]*[$Resumen.$C$4]" office:value-type="float" office:value="53487.1686232968" calcext:value-type="float">
            <text:p>53487</text:p>
          </table:table-cell>
          <table:table-cell table:style-name="ce232" table:formula="of:=+[.I15]*[$Resumen.$C$4]" office:value-type="float" office:value="97517.3368782541" calcext:value-type="float">
            <text:p>97517</text:p>
          </table:table-cell>
          <table:table-cell table:style-name="ce232" table:formula="of:=+[.J15]*[$Resumen.$C$4]" office:value-type="float" office:value="57782.8714689266" calcext:value-type="float">
            <text:p>57783</text:p>
          </table:table-cell>
          <table:table-cell table:style-name="ce232" table:formula="of:=+[.K15]*[$Resumen.$C$4]" office:value-type="float" office:value="58552.7451811233" calcext:value-type="float">
            <text:p>58553</text:p>
          </table:table-cell>
          <table:table-cell table:style-name="ce232" table:formula="of:=+[.L15]*[$Resumen.$C$4]" office:value-type="float" office:value="58681.0574664894" calcext:value-type="float">
            <text:p>58681</text:p>
          </table:table-cell>
          <table:table-cell table:style-name="ce232" table:formula="of:=+[.M15]*[$Resumen.$C$4]" office:value-type="float" office:value="64084.9935208264" calcext:value-type="float">
            <text:p>64085</text:p>
          </table:table-cell>
          <table:table-cell table:style-name="ce232" table:formula="of:=+[.N15]*[$Resumen.$C$4]" office:value-type="float" office:value="102649.828292899" calcext:value-type="float">
            <text:p>102650</text:p>
          </table:table-cell>
          <table:table-cell table:style-name="ce234" table:formula="of:=SUM([.R15:.AC15])" office:value-type="float" office:value="765639.406779661" calcext:value-type="float">
            <text:p>765639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4" calcext:value-type="float">
            <text:p>4</text:p>
          </table:table-cell>
          <table:table-cell table:style-name="ce216" table:formula="of:=+[.$O$16]*[.C4]" office:value-type="float" office:value="5233.98892156863" calcext:value-type="float">
            <text:p>5,234</text:p>
          </table:table-cell>
          <table:table-cell table:style-name="ce216" table:formula="of:=+[.$O$16]*[.D4]" office:value-type="float" office:value="5283.87563180828" calcext:value-type="float">
            <text:p>5,284</text:p>
          </table:table-cell>
          <table:table-cell table:style-name="ce216" table:formula="of:=+[.$O$16]*[.E4]" office:value-type="float" office:value="5358.70569716776" calcext:value-type="float">
            <text:p>5,359</text:p>
          </table:table-cell>
          <table:table-cell table:style-name="ce216" table:formula="of:=+[.$O$16]*[.F4]" office:value-type="float" office:value="5360.76352396514" calcext:value-type="float">
            <text:p>5,361</text:p>
          </table:table-cell>
          <table:table-cell table:style-name="ce216" table:formula="of:=+[.$O$16]*[.G4]" office:value-type="float" office:value="5286.34502396514" calcext:value-type="float">
            <text:p>5,286</text:p>
          </table:table-cell>
          <table:table-cell table:style-name="ce216" table:formula="of:=+[.$O$16]*[.H4]" office:value-type="float" office:value="5198.83749836601" calcext:value-type="float">
            <text:p>5,199</text:p>
          </table:table-cell>
          <table:table-cell table:style-name="ce216" table:formula="of:=+[.$O$16]*[.I4]" office:value-type="float" office:value="9478.47494553377" calcext:value-type="float">
            <text:p>9,478</text:p>
          </table:table-cell>
          <table:table-cell table:style-name="ce216" table:formula="of:=+[.$O$16]*[.J4]" office:value-type="float" office:value="5616.37055555556" calcext:value-type="float">
            <text:p>5,616</text:p>
          </table:table-cell>
          <table:table-cell table:style-name="ce216" table:formula="of:=+[.$O$16]*[.K4]" office:value-type="float" office:value="5691.20062091503" calcext:value-type="float">
            <text:p>5,691</text:p>
          </table:table-cell>
          <table:table-cell table:style-name="ce216" table:formula="of:=+[.$O$16]*[.L4]" office:value-type="float" office:value="5703.67229847494" calcext:value-type="float">
            <text:p>5,704</text:p>
          </table:table-cell>
          <table:table-cell table:style-name="ce216" table:formula="of:=+[.$O$16]*[.M4]" office:value-type="float" office:value="6228.92323474945" calcext:value-type="float">
            <text:p>6,229</text:p>
          </table:table-cell>
          <table:table-cell table:style-name="ce216" table:formula="of:=+[.$O$16]*[.N4]" office:value-type="float" office:value="9977.34204793028" calcext:value-type="float">
            <text:p>9,977</text:p>
          </table:table-cell>
          <table:table-cell table:style-name="ce227" table:formula="of:=+[.O15]*(1+[.$D$6])" office:value-type="float" office:value="74418.5" calcext:value-type="float">
            <text:p>74,419</text:p>
          </table:table-cell>
          <table:table-cell/>
          <table:table-cell table:style-name="ce206" office:value-type="float" office:value="4" calcext:value-type="float">
            <text:p>4</text:p>
          </table:table-cell>
          <table:table-cell table:style-name="ce232" table:formula="of:=+[.C16]*[$Resumen.$C$4]" office:value-type="float" office:value="57618.2339755733" calcext:value-type="float">
            <text:p>57618</text:p>
          </table:table-cell>
          <table:table-cell table:style-name="ce232" table:formula="of:=+[.D16]*[$Resumen.$C$4]" office:value-type="float" office:value="58167.4105569403" calcext:value-type="float">
            <text:p>58167</text:p>
          </table:table-cell>
          <table:table-cell table:style-name="ce232" table:formula="of:=+[.E16]*[$Resumen.$C$4]" office:value-type="float" office:value="58991.1754289908" calcext:value-type="float">
            <text:p>58991</text:p>
          </table:table-cell>
          <table:table-cell table:style-name="ce232" table:formula="of:=+[.F16]*[$Resumen.$C$4]" office:value-type="float" office:value="59013.8289629722" calcext:value-type="float">
            <text:p>59014</text:p>
          </table:table-cell>
          <table:table-cell table:style-name="ce232" table:formula="of:=+[.G16]*[$Resumen.$C$4]" office:value-type="float" office:value="58194.594797718" calcext:value-type="float">
            <text:p>58195</text:p>
          </table:table-cell>
          <table:table-cell table:style-name="ce232" table:formula="of:=+[.H16]*[$Resumen.$C$4]" office:value-type="float" office:value="57231.2704269275" calcext:value-type="float">
            <text:p>57231</text:p>
          </table:table-cell>
          <table:table-cell table:style-name="ce232" table:formula="of:=+[.I16]*[$Resumen.$C$4]" office:value-type="float" office:value="104343.550459732" calcext:value-type="float">
            <text:p>104344</text:p>
          </table:table-cell>
          <table:table-cell table:style-name="ce232" table:formula="of:=+[.J16]*[$Resumen.$C$4]" office:value-type="float" office:value="61827.6724717514" calcext:value-type="float">
            <text:p>61828</text:p>
          </table:table-cell>
          <table:table-cell table:style-name="ce232" table:formula="of:=+[.K16]*[$Resumen.$C$4]" office:value-type="float" office:value="62651.437343802" calcext:value-type="float">
            <text:p>62651</text:p>
          </table:table-cell>
          <table:table-cell table:style-name="ce232" table:formula="of:=+[.L16]*[$Resumen.$C$4]" office:value-type="float" office:value="62788.7314891437" calcext:value-type="float">
            <text:p>62789</text:p>
          </table:table-cell>
          <table:table-cell table:style-name="ce232" table:formula="of:=+[.M16]*[$Resumen.$C$4]" office:value-type="float" office:value="68570.9430672842" calcext:value-type="float">
            <text:p>68571</text:p>
          </table:table-cell>
          <table:table-cell table:style-name="ce232" table:formula="of:=+[.N16]*[$Resumen.$C$4]" office:value-type="float" office:value="109835.316273402" calcext:value-type="float">
            <text:p>109835</text:p>
          </table:table-cell>
          <table:table-cell table:style-name="ce234" table:formula="of:=SUM([.R16:.AC16])" office:value-type="float" office:value="819234.165254237" calcext:value-type="float">
            <text:p>819234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5" calcext:value-type="float">
            <text:p>5</text:p>
          </table:table-cell>
          <table:table-cell table:style-name="ce216" table:formula="of:=+[.$O$17]*[.C4]" office:value-type="float" office:value="5600.36814607843" calcext:value-type="float">
            <text:p>5,600</text:p>
          </table:table-cell>
          <table:table-cell table:style-name="ce216" table:formula="of:=+[.$O$17]*[.D4]" office:value-type="float" office:value="5653.74692603486" calcext:value-type="float">
            <text:p>5,654</text:p>
          </table:table-cell>
          <table:table-cell table:style-name="ce216" table:formula="of:=+[.$O$17]*[.E4]" office:value-type="float" office:value="5733.8150959695" calcext:value-type="float">
            <text:p>5,734</text:p>
          </table:table-cell>
          <table:table-cell table:style-name="ce216" table:formula="of:=+[.$O$17]*[.F4]" office:value-type="float" office:value="5736.0169706427" calcext:value-type="float">
            <text:p>5,736</text:p>
          </table:table-cell>
          <table:table-cell table:style-name="ce216" table:formula="of:=+[.$O$17]*[.G4]" office:value-type="float" office:value="5656.3891756427" calcext:value-type="float">
            <text:p>5,656</text:p>
          </table:table-cell>
          <table:table-cell table:style-name="ce216" table:formula="of:=+[.$O$17]*[.H4]" office:value-type="float" office:value="5562.75612325163" calcext:value-type="float">
            <text:p>5,563</text:p>
          </table:table-cell>
          <table:table-cell table:style-name="ce216" table:formula="of:=+[.$O$17]*[.I4]" office:value-type="float" office:value="10141.9681917211" calcext:value-type="float">
            <text:p>10,142</text:p>
          </table:table-cell>
          <table:table-cell table:style-name="ce216" table:formula="of:=+[.$O$17]*[.J4]" office:value-type="float" office:value="6009.51649444445" calcext:value-type="float">
            <text:p>6,010</text:p>
          </table:table-cell>
          <table:table-cell table:style-name="ce216" table:formula="of:=+[.$O$17]*[.K4]" office:value-type="float" office:value="6089.58466437909" calcext:value-type="float">
            <text:p>6,090</text:p>
          </table:table-cell>
          <table:table-cell table:style-name="ce216" table:formula="of:=+[.$O$17]*[.L4]" office:value-type="float" office:value="6102.92935936819" calcext:value-type="float">
            <text:p>6,103</text:p>
          </table:table-cell>
          <table:table-cell table:style-name="ce216" table:formula="of:=+[.$O$17]*[.M4]" office:value-type="float" office:value="6664.94786118191" calcext:value-type="float">
            <text:p>6,665</text:p>
          </table:table-cell>
          <table:table-cell table:style-name="ce216" table:formula="of:=+[.$O$17]*[.N4]" office:value-type="float" office:value="10675.7559912854" calcext:value-type="float">
            <text:p>10,676</text:p>
          </table:table-cell>
          <table:table-cell table:style-name="ce227" table:formula="of:=+[.O16]*(1+[.$D$6])" office:value-type="float" office:value="79627.795" calcext:value-type="float">
            <text:p>79,628</text:p>
          </table:table-cell>
          <table:table-cell/>
          <table:table-cell table:style-name="ce206" office:value-type="float" office:value="5" calcext:value-type="float">
            <text:p>5</text:p>
          </table:table-cell>
          <table:table-cell table:style-name="ce232" table:formula="of:=+[.C17]*[$Resumen.$C$4]" office:value-type="float" office:value="61651.5103538634" calcext:value-type="float">
            <text:p>61652</text:p>
          </table:table-cell>
          <table:table-cell table:style-name="ce232" table:formula="of:=+[.D17]*[$Resumen.$C$4]" office:value-type="float" office:value="62239.1292959261" calcext:value-type="float">
            <text:p>62239</text:p>
          </table:table-cell>
          <table:table-cell table:style-name="ce232" table:formula="of:=+[.E17]*[$Resumen.$C$4]" office:value-type="float" office:value="63120.5577090202" calcext:value-type="float">
            <text:p>63121</text:p>
          </table:table-cell>
          <table:table-cell table:style-name="ce232" table:formula="of:=+[.F17]*[$Resumen.$C$4]" office:value-type="float" office:value="63144.7969903803" calcext:value-type="float">
            <text:p>63145</text:p>
          </table:table-cell>
          <table:table-cell table:style-name="ce232" table:formula="of:=+[.G17]*[$Resumen.$C$4]" office:value-type="float" office:value="62268.2164335582" calcext:value-type="float">
            <text:p>62268</text:p>
          </table:table-cell>
          <table:table-cell table:style-name="ce232" table:formula="of:=+[.H17]*[$Resumen.$C$4]" office:value-type="float" office:value="61237.4593568125" calcext:value-type="float">
            <text:p>61237</text:p>
          </table:table-cell>
          <table:table-cell table:style-name="ce232" table:formula="of:=+[.I17]*[$Resumen.$C$4]" office:value-type="float" office:value="111647.598991913" calcext:value-type="float">
            <text:p>111648</text:p>
          </table:table-cell>
          <table:table-cell table:style-name="ce232" table:formula="of:=+[.J17]*[$Resumen.$C$4]" office:value-type="float" office:value="66155.609544774" calcext:value-type="float">
            <text:p>66156</text:p>
          </table:table-cell>
          <table:table-cell table:style-name="ce232" table:formula="of:=+[.K17]*[$Resumen.$C$4]" office:value-type="float" office:value="67037.0379578681" calcext:value-type="float">
            <text:p>67037</text:p>
          </table:table-cell>
          <table:table-cell table:style-name="ce232" table:formula="of:=+[.L17]*[$Resumen.$C$4]" office:value-type="float" office:value="67183.9426933837" calcext:value-type="float">
            <text:p>67184</text:p>
          </table:table-cell>
          <table:table-cell table:style-name="ce232" table:formula="of:=+[.M17]*[$Resumen.$C$4]" office:value-type="float" office:value="73370.9090819941" calcext:value-type="float">
            <text:p>73371</text:p>
          </table:table-cell>
          <table:table-cell table:style-name="ce232" table:formula="of:=+[.N17]*[$Resumen.$C$4]" office:value-type="float" office:value="117523.78841254" calcext:value-type="float">
            <text:p>117524</text:p>
          </table:table-cell>
          <table:table-cell table:style-name="ce234" table:formula="of:=SUM([.R17:.AC17])" office:value-type="float" office:value="876580.556822034" calcext:value-type="float">
            <text:p>876581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6" calcext:value-type="float">
            <text:p>6</text:p>
          </table:table-cell>
          <table:table-cell table:style-name="ce216" table:formula="of:=+[.$O$18]*[.C4]" office:value-type="float" office:value="5992.39391630392" calcext:value-type="float">
            <text:p>5,992</text:p>
          </table:table-cell>
          <table:table-cell table:style-name="ce216" table:formula="of:=+[.$O$18]*[.D4]" office:value-type="float" office:value="6049.5092108573" calcext:value-type="float">
            <text:p>6,050</text:p>
          </table:table-cell>
          <table:table-cell table:style-name="ce216" table:formula="of:=+[.$O$18]*[.E4]" office:value-type="float" office:value="6135.18215268737" calcext:value-type="float">
            <text:p>6,135</text:p>
          </table:table-cell>
          <table:table-cell table:style-name="ce216" table:formula="of:=+[.$O$18]*[.F4]" office:value-type="float" office:value="6137.53815858769" calcext:value-type="float">
            <text:p>6,138</text:p>
          </table:table-cell>
          <table:table-cell table:style-name="ce216" table:formula="of:=+[.$O$18]*[.G4]" office:value-type="float" office:value="6052.33641793769" calcext:value-type="float">
            <text:p>6,052</text:p>
          </table:table-cell>
          <table:table-cell table:style-name="ce216" table:formula="of:=+[.$O$18]*[.H4]" office:value-type="float" office:value="5952.14905187925" calcext:value-type="float">
            <text:p>5,952</text:p>
          </table:table-cell>
          <table:table-cell table:style-name="ce216" table:formula="of:=+[.$O$18]*[.I4]" office:value-type="float" office:value="10851.9059651416" calcext:value-type="float">
            <text:p>10,852</text:p>
          </table:table-cell>
          <table:table-cell table:style-name="ce216" table:formula="of:=+[.$O$18]*[.J4]" office:value-type="float" office:value="6430.18264905556" calcext:value-type="float">
            <text:p>6,430</text:p>
          </table:table-cell>
          <table:table-cell table:style-name="ce216" table:formula="of:=+[.$O$18]*[.K4]" office:value-type="float" office:value="6515.85559088562" calcext:value-type="float">
            <text:p>6,516</text:p>
          </table:table-cell>
          <table:table-cell table:style-name="ce216" table:formula="of:=+[.$O$18]*[.L4]" office:value-type="float" office:value="6530.13441452397" calcext:value-type="float">
            <text:p>6,530</text:p>
          </table:table-cell>
          <table:table-cell table:style-name="ce216" table:formula="of:=+[.$O$18]*[.M4]" office:value-type="float" office:value="7131.49421146465" calcext:value-type="float">
            <text:p>7,131</text:p>
          </table:table-cell>
          <table:table-cell table:style-name="ce216" table:formula="of:=+[.$O$18]*[.N4]" office:value-type="float" office:value="11423.0589106754" calcext:value-type="float">
            <text:p>11,423</text:p>
          </table:table-cell>
          <table:table-cell table:style-name="ce227" table:formula="of:=+[.O17]*(1+[.$D$6])" office:value-type="float" office:value="85201.74065" calcext:value-type="float">
            <text:p>85,202</text:p>
          </table:table-cell>
          <table:table-cell/>
          <table:table-cell table:style-name="ce206" office:value-type="float" office:value="6" calcext:value-type="float">
            <text:p>6</text:p>
          </table:table-cell>
          <table:table-cell table:style-name="ce232" table:formula="of:=+[.C18]*[$Resumen.$C$4]" office:value-type="float" office:value="65967.1160786339" calcext:value-type="float">
            <text:p>65967</text:p>
          </table:table-cell>
          <table:table-cell table:style-name="ce232" table:formula="of:=+[.D18]*[$Resumen.$C$4]" office:value-type="float" office:value="66595.868346641" calcext:value-type="float">
            <text:p>66596</text:p>
          </table:table-cell>
          <table:table-cell table:style-name="ce232" table:formula="of:=+[.E18]*[$Resumen.$C$4]" office:value-type="float" office:value="67538.9967486516" calcext:value-type="float">
            <text:p>67539</text:p>
          </table:table-cell>
          <table:table-cell table:style-name="ce232" table:formula="of:=+[.F18]*[$Resumen.$C$4]" office:value-type="float" office:value="67564.9327797069" calcext:value-type="float">
            <text:p>67565</text:p>
          </table:table-cell>
          <table:table-cell table:style-name="ce232" table:formula="of:=+[.G18]*[$Resumen.$C$4]" office:value-type="float" office:value="66626.9915839073" calcext:value-type="float">
            <text:p>66627</text:p>
          </table:table-cell>
          <table:table-cell table:style-name="ce232" table:formula="of:=+[.H18]*[$Resumen.$C$4]" office:value-type="float" office:value="65524.0815117894" calcext:value-type="float">
            <text:p>65524</text:p>
          </table:table-cell>
          <table:table-cell table:style-name="ce232" table:formula="of:=+[.I18]*[$Resumen.$C$4]" office:value-type="float" office:value="119462.930921347" calcext:value-type="float">
            <text:p>119463</text:p>
          </table:table-cell>
          <table:table-cell table:style-name="ce232" table:formula="of:=+[.J18]*[$Resumen.$C$4]" office:value-type="float" office:value="70786.5022129082" calcext:value-type="float">
            <text:p>70787</text:p>
          </table:table-cell>
          <table:table-cell table:style-name="ce232" table:formula="of:=+[.K18]*[$Resumen.$C$4]" office:value-type="float" office:value="71729.6306149189" calcext:value-type="float">
            <text:p>71730</text:p>
          </table:table-cell>
          <table:table-cell table:style-name="ce232" table:formula="of:=+[.L18]*[$Resumen.$C$4]" office:value-type="float" office:value="71886.8186819206" calcext:value-type="float">
            <text:p>71887</text:p>
          </table:table-cell>
          <table:table-cell table:style-name="ce232" table:formula="of:=+[.M18]*[$Resumen.$C$4]" office:value-type="float" office:value="78506.8727177337" calcext:value-type="float">
            <text:p>78507</text:p>
          </table:table-cell>
          <table:table-cell table:style-name="ce232" table:formula="of:=+[.N18]*[$Resumen.$C$4]" office:value-type="float" office:value="125750.453601418" calcext:value-type="float">
            <text:p>125750</text:p>
          </table:table-cell>
          <table:table-cell table:style-name="ce234" table:formula="of:=SUM([.R18:.AC18])" office:value-type="float" office:value="937941.195799576" calcext:value-type="float">
            <text:p>937941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7" calcext:value-type="float">
            <text:p>7</text:p>
          </table:table-cell>
          <table:table-cell table:style-name="ce216" table:formula="of:=+[.$O$19]*[.C4]" office:value-type="float" office:value="6411.8614904452" calcext:value-type="float">
            <text:p>6,412</text:p>
          </table:table-cell>
          <table:table-cell table:style-name="ce216" table:formula="of:=+[.$O$19]*[.D4]" office:value-type="float" office:value="6472.97485561731" calcext:value-type="float">
            <text:p>6,473</text:p>
          </table:table-cell>
          <table:table-cell table:style-name="ce216" table:formula="of:=+[.$O$19]*[.E4]" office:value-type="float" office:value="6564.64490337548" calcext:value-type="float">
            <text:p>6,565</text:p>
          </table:table-cell>
          <table:table-cell table:style-name="ce216" table:formula="of:=+[.$O$19]*[.F4]" office:value-type="float" office:value="6567.16582968883" calcext:value-type="float">
            <text:p>6,567</text:p>
          </table:table-cell>
          <table:table-cell table:style-name="ce216" table:formula="of:=+[.$O$19]*[.G4]" office:value-type="float" office:value="6475.99996719333" calcext:value-type="float">
            <text:p>6,476</text:p>
          </table:table-cell>
          <table:table-cell table:style-name="ce216" table:formula="of:=+[.$O$19]*[.H4]" office:value-type="float" office:value="6368.7994855108" calcext:value-type="float">
            <text:p>6,369</text:p>
          </table:table-cell>
          <table:table-cell table:style-name="ce216" table:formula="of:=+[.$O$19]*[.I4]" office:value-type="float" office:value="11611.5393827015" calcext:value-type="float">
            <text:p>11,612</text:p>
          </table:table-cell>
          <table:table-cell table:style-name="ce216" table:formula="of:=+[.$O$19]*[.J4]" office:value-type="float" office:value="6880.29543448945" calcext:value-type="float">
            <text:p>6,880</text:p>
          </table:table-cell>
          <table:table-cell table:style-name="ce216" table:formula="of:=+[.$O$19]*[.K4]" office:value-type="float" office:value="6971.96548224762" calcext:value-type="float">
            <text:p>6,972</text:p>
          </table:table-cell>
          <table:table-cell table:style-name="ce216" table:formula="of:=+[.$O$19]*[.L4]" office:value-type="float" office:value="6987.24382354064" calcext:value-type="float">
            <text:p>6,987</text:p>
          </table:table-cell>
          <table:table-cell table:style-name="ce216" table:formula="of:=+[.$O$19]*[.M4]" office:value-type="float" office:value="7630.69880626717" calcext:value-type="float">
            <text:p>7,631</text:p>
          </table:table-cell>
          <table:table-cell table:style-name="ce216" table:formula="of:=+[.$O$19]*[.N4]" office:value-type="float" office:value="12222.6730344227" calcext:value-type="float">
            <text:p>12,223</text:p>
          </table:table-cell>
          <table:table-cell table:style-name="ce227" table:formula="of:=+[.O18]*(1+[.$D$6])" office:value-type="float" office:value="91165.8624955" calcext:value-type="float">
            <text:p>91,166</text:p>
          </table:table-cell>
          <table:table-cell/>
          <table:table-cell table:style-name="ce206" office:value-type="float" office:value="7" calcext:value-type="float">
            <text:p>7</text:p>
          </table:table-cell>
          <table:table-cell table:style-name="ce232" table:formula="of:=+[.C19]*[$Resumen.$C$4]" office:value-type="float" office:value="70584.8142041382" calcext:value-type="float">
            <text:p>70585</text:p>
          </table:table-cell>
          <table:table-cell table:style-name="ce232" table:formula="of:=+[.D19]*[$Resumen.$C$4]" office:value-type="float" office:value="71257.5791309058" calcext:value-type="float">
            <text:p>71258</text:p>
          </table:table-cell>
          <table:table-cell table:style-name="ce232" table:formula="of:=+[.E19]*[$Resumen.$C$4]" office:value-type="float" office:value="72266.7265210572" calcext:value-type="float">
            <text:p>72267</text:p>
          </table:table-cell>
          <table:table-cell table:style-name="ce232" table:formula="of:=+[.F19]*[$Resumen.$C$4]" office:value-type="float" office:value="72294.4780742864" calcext:value-type="float">
            <text:p>72294</text:p>
          </table:table-cell>
          <table:table-cell table:style-name="ce232" table:formula="of:=+[.G19]*[$Resumen.$C$4]" office:value-type="float" office:value="71290.8809947808" calcext:value-type="float">
            <text:p>71291</text:p>
          </table:table-cell>
          <table:table-cell table:style-name="ce232" table:formula="of:=+[.H19]*[$Resumen.$C$4]" office:value-type="float" office:value="70110.7672176146" calcext:value-type="float">
            <text:p>70111</text:p>
          </table:table-cell>
          <table:table-cell table:style-name="ce232" table:formula="of:=+[.I19]*[$Resumen.$C$4]" office:value-type="float" office:value="127825.336085841" calcext:value-type="float">
            <text:p>127825</text:p>
          </table:table-cell>
          <table:table-cell table:style-name="ce232" table:formula="of:=+[.J19]*[$Resumen.$C$4]" office:value-type="float" office:value="75741.5573678118" calcext:value-type="float">
            <text:p>75742</text:p>
          </table:table-cell>
          <table:table-cell table:style-name="ce232" table:formula="of:=+[.K19]*[$Resumen.$C$4]" office:value-type="float" office:value="76750.7047579632" calcext:value-type="float">
            <text:p>76751</text:p>
          </table:table-cell>
          <table:table-cell table:style-name="ce232" table:formula="of:=+[.L19]*[$Resumen.$C$4]" office:value-type="float" office:value="76918.895989655" calcext:value-type="float">
            <text:p>76919</text:p>
          </table:table-cell>
          <table:table-cell table:style-name="ce232" table:formula="of:=+[.M19]*[$Resumen.$C$4]" office:value-type="float" office:value="84002.3538079751" calcext:value-type="float">
            <text:p>84002</text:p>
          </table:table-cell>
          <table:table-cell table:style-name="ce232" table:formula="of:=+[.N19]*[$Resumen.$C$4]" office:value-type="float" office:value="134552.985353517" calcext:value-type="float">
            <text:p>134553</text:p>
          </table:table-cell>
          <table:table-cell table:style-name="ce234" table:formula="of:=SUM([.R19:.AC19])" office:value-type="float" office:value="1003597.07950555" calcext:value-type="float">
            <text:p>1003597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8" calcext:value-type="float">
            <text:p>8</text:p>
          </table:table-cell>
          <table:table-cell table:style-name="ce216" table:formula="of:=+[.$O$20]*[.C4]" office:value-type="float" office:value="6860.69179477636" calcext:value-type="float">
            <text:p>6,861</text:p>
          </table:table-cell>
          <table:table-cell table:style-name="ce216" table:formula="of:=+[.$O$20]*[.D4]" office:value-type="float" office:value="6926.08309551053" calcext:value-type="float">
            <text:p>6,926</text:p>
          </table:table-cell>
          <table:table-cell table:style-name="ce216" table:formula="of:=+[.$O$20]*[.E4]" office:value-type="float" office:value="7024.17004661177" calcext:value-type="float">
            <text:p>7,024</text:p>
          </table:table-cell>
          <table:table-cell table:style-name="ce216" table:formula="of:=+[.$O$20]*[.F4]" office:value-type="float" office:value="7026.86743776705" calcext:value-type="float">
            <text:p>7,027</text:p>
          </table:table-cell>
          <table:table-cell table:style-name="ce216" table:formula="of:=+[.$O$20]*[.G4]" office:value-type="float" office:value="6929.31996489686" calcext:value-type="float">
            <text:p>6,929</text:p>
          </table:table-cell>
          <table:table-cell table:style-name="ce216" table:formula="of:=+[.$O$20]*[.H4]" office:value-type="float" office:value="6814.61544949655" calcext:value-type="float">
            <text:p>6,815</text:p>
          </table:table-cell>
          <table:table-cell table:style-name="ce216" table:formula="of:=+[.$O$20]*[.I4]" office:value-type="float" office:value="12424.3471394906" calcext:value-type="float">
            <text:p>12,424</text:p>
          </table:table-cell>
          <table:table-cell table:style-name="ce216" table:formula="of:=+[.$O$20]*[.J4]" office:value-type="float" office:value="7361.91611490371" calcext:value-type="float">
            <text:p>7,362</text:p>
          </table:table-cell>
          <table:table-cell table:style-name="ce216" table:formula="of:=+[.$O$20]*[.K4]" office:value-type="float" office:value="7460.00306600495" calcext:value-type="float">
            <text:p>7,460</text:p>
          </table:table-cell>
          <table:table-cell table:style-name="ce216" table:formula="of:=+[.$O$20]*[.L4]" office:value-type="float" office:value="7476.35089118849" calcext:value-type="float">
            <text:p>7,476</text:p>
          </table:table-cell>
          <table:table-cell table:style-name="ce216" table:formula="of:=+[.$O$20]*[.M4]" office:value-type="float" office:value="8164.84772270588" calcext:value-type="float">
            <text:p>8,165</text:p>
          </table:table-cell>
          <table:table-cell table:style-name="ce216" table:formula="of:=+[.$O$20]*[.N4]" office:value-type="float" office:value="13078.2601468322" calcext:value-type="float">
            <text:p>13,078</text:p>
          </table:table-cell>
          <table:table-cell table:style-name="ce227" table:formula="of:=+[.O19]*(1+[.$D$6])" office:value-type="float" office:value="97547.472870185" calcext:value-type="float">
            <text:p>97,547</text:p>
          </table:table-cell>
          <table:table-cell/>
          <table:table-cell table:style-name="ce206" office:value-type="float" office:value="8" calcext:value-type="float">
            <text:p>8</text:p>
          </table:table-cell>
          <table:table-cell table:style-name="ce232" table:formula="of:=+[.C20]*[$Resumen.$C$4]" office:value-type="float" office:value="75525.7511984279" calcext:value-type="float">
            <text:p>75526</text:p>
          </table:table-cell>
          <table:table-cell table:style-name="ce232" table:formula="of:=+[.D20]*[$Resumen.$C$4]" office:value-type="float" office:value="76245.6096700693" calcext:value-type="float">
            <text:p>76246</text:p>
          </table:table-cell>
          <table:table-cell table:style-name="ce232" table:formula="of:=+[.E20]*[$Resumen.$C$4]" office:value-type="float" office:value="77325.3973775312" calcext:value-type="float">
            <text:p>77325</text:p>
          </table:table-cell>
          <table:table-cell table:style-name="ce232" table:formula="of:=+[.F20]*[$Resumen.$C$4]" office:value-type="float" office:value="77355.0915394864" calcext:value-type="float">
            <text:p>77355</text:p>
          </table:table-cell>
          <table:table-cell table:style-name="ce232" table:formula="of:=+[.G20]*[$Resumen.$C$4]" office:value-type="float" office:value="76281.2426644155" calcext:value-type="float">
            <text:p>76281</text:p>
          </table:table-cell>
          <table:table-cell table:style-name="ce232" table:formula="of:=+[.H20]*[$Resumen.$C$4]" office:value-type="float" office:value="75018.5209228477" calcext:value-type="float">
            <text:p>75019</text:p>
          </table:table-cell>
          <table:table-cell table:style-name="ce232" table:formula="of:=+[.I20]*[$Resumen.$C$4]" office:value-type="float" office:value="136773.10961185" calcext:value-type="float">
            <text:p>136773</text:p>
          </table:table-cell>
          <table:table-cell table:style-name="ce232" table:formula="of:=+[.J20]*[$Resumen.$C$4]" office:value-type="float" office:value="81043.4663835587" calcext:value-type="float">
            <text:p>81043</text:p>
          </table:table-cell>
          <table:table-cell table:style-name="ce232" table:formula="of:=+[.K20]*[$Resumen.$C$4]" office:value-type="float" office:value="82123.2540910206" calcext:value-type="float">
            <text:p>82123</text:p>
          </table:table-cell>
          <table:table-cell table:style-name="ce232" table:formula="of:=+[.L20]*[$Resumen.$C$4]" office:value-type="float" office:value="82303.2187089309" calcext:value-type="float">
            <text:p>82303</text:p>
          </table:table-cell>
          <table:table-cell table:style-name="ce232" table:formula="of:=+[.M20]*[$Resumen.$C$4]" office:value-type="float" office:value="89882.5185745333" calcext:value-type="float">
            <text:p>89883</text:p>
          </table:table-cell>
          <table:table-cell table:style-name="ce232" table:formula="of:=+[.N20]*[$Resumen.$C$4]" office:value-type="float" office:value="143971.694328263" calcext:value-type="float">
            <text:p>143972</text:p>
          </table:table-cell>
          <table:table-cell table:style-name="ce234" table:formula="of:=SUM([.R20:.AC20])" office:value-type="float" office:value="1073848.87507094" calcext:value-type="float">
            <text:p>1073849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9" calcext:value-type="float">
            <text:p>9</text:p>
          </table:table-cell>
          <table:table-cell table:style-name="ce216" table:formula="of:=+[.$O$21]*[.C4]" office:value-type="float" office:value="7340.94022041071" calcext:value-type="float">
            <text:p>7,341</text:p>
          </table:table-cell>
          <table:table-cell table:style-name="ce216" table:formula="of:=+[.$O$21]*[.D4]" office:value-type="float" office:value="7410.90891219626" calcext:value-type="float">
            <text:p>7,411</text:p>
          </table:table-cell>
          <table:table-cell table:style-name="ce216" table:formula="of:=+[.$O$21]*[.E4]" office:value-type="float" office:value="7515.86194987459" calcext:value-type="float">
            <text:p>7,516</text:p>
          </table:table-cell>
          <table:table-cell table:style-name="ce216" table:formula="of:=+[.$O$21]*[.F4]" office:value-type="float" office:value="7518.74815841074" calcext:value-type="float">
            <text:p>7,519</text:p>
          </table:table-cell>
          <table:table-cell table:style-name="ce216" table:formula="of:=+[.$O$21]*[.G4]" office:value-type="float" office:value="7414.37236243964" calcext:value-type="float">
            <text:p>7,414</text:p>
          </table:table-cell>
          <table:table-cell table:style-name="ce216" table:formula="of:=+[.$O$21]*[.H4]" office:value-type="float" office:value="7291.63853096131" calcext:value-type="float">
            <text:p>7,292</text:p>
          </table:table-cell>
          <table:table-cell table:style-name="ce216" table:formula="of:=+[.$O$21]*[.I4]" office:value-type="float" office:value="13294.051439255" calcext:value-type="float">
            <text:p>13,294</text:p>
          </table:table-cell>
          <table:table-cell table:style-name="ce216" table:formula="of:=+[.$O$21]*[.J4]" office:value-type="float" office:value="7877.25024294697" calcext:value-type="float">
            <text:p>7,877</text:p>
          </table:table-cell>
          <table:table-cell table:style-name="ce216" table:formula="of:=+[.$O$21]*[.K4]" office:value-type="float" office:value="7982.2032806253" calcext:value-type="float">
            <text:p>7,982</text:p>
          </table:table-cell>
          <table:table-cell table:style-name="ce216" table:formula="of:=+[.$O$21]*[.L4]" office:value-type="float" office:value="7999.69545357168" calcext:value-type="float">
            <text:p>8,000</text:p>
          </table:table-cell>
          <table:table-cell table:style-name="ce216" table:formula="of:=+[.$O$21]*[.M4]" office:value-type="float" office:value="8736.38706329529" calcext:value-type="float">
            <text:p>8,736</text:p>
          </table:table-cell>
          <table:table-cell table:style-name="ce216" table:formula="of:=+[.$O$21]*[.N4]" office:value-type="float" office:value="13993.7383571105" calcext:value-type="float">
            <text:p>13,994</text:p>
          </table:table-cell>
          <table:table-cell table:style-name="ce227" table:formula="of:=+[.O20]*(1+[.$D$6])" office:value-type="float" office:value="104375.795971098" calcext:value-type="float">
            <text:p>104,376</text:p>
          </table:table-cell>
          <table:table-cell/>
          <table:table-cell table:style-name="ce206" office:value-type="float" office:value="9" calcext:value-type="float">
            <text:p>9</text:p>
          </table:table-cell>
          <table:table-cell table:style-name="ce232" table:formula="of:=+[.C21]*[$Resumen.$C$4]" office:value-type="float" office:value="80812.5537823179" calcext:value-type="float">
            <text:p>80813</text:p>
          </table:table-cell>
          <table:table-cell table:style-name="ce232" table:formula="of:=+[.D21]*[$Resumen.$C$4]" office:value-type="float" office:value="81582.8023469741" calcext:value-type="float">
            <text:p>81583</text:p>
          </table:table-cell>
          <table:table-cell table:style-name="ce232" table:formula="of:=+[.E21]*[$Resumen.$C$4]" office:value-type="float" office:value="82738.1751939584" calcext:value-type="float">
            <text:p>82738</text:p>
          </table:table-cell>
          <table:table-cell table:style-name="ce232" table:formula="of:=+[.F21]*[$Resumen.$C$4]" office:value-type="float" office:value="82769.9479472505" calcext:value-type="float">
            <text:p>82770</text:p>
          </table:table-cell>
          <table:table-cell table:style-name="ce232" table:formula="of:=+[.G21]*[$Resumen.$C$4]" office:value-type="float" office:value="81620.9296509246" calcext:value-type="float">
            <text:p>81621</text:p>
          </table:table-cell>
          <table:table-cell table:style-name="ce232" table:formula="of:=+[.H21]*[$Resumen.$C$4]" office:value-type="float" office:value="80269.817387447" calcext:value-type="float">
            <text:p>80270</text:p>
          </table:table-cell>
          <table:table-cell table:style-name="ce232" table:formula="of:=+[.I21]*[$Resumen.$C$4]" office:value-type="float" office:value="146347.22728468" calcext:value-type="float">
            <text:p>146347</text:p>
          </table:table-cell>
          <table:table-cell table:style-name="ce232" table:formula="of:=+[.J21]*[$Resumen.$C$4]" office:value-type="float" office:value="86716.5090304078" calcext:value-type="float">
            <text:p>86717</text:p>
          </table:table-cell>
          <table:table-cell table:style-name="ce232" table:formula="of:=+[.K21]*[$Resumen.$C$4]" office:value-type="float" office:value="87871.8818773921" calcext:value-type="float">
            <text:p>87872</text:p>
          </table:table-cell>
          <table:table-cell table:style-name="ce232" table:formula="of:=+[.L21]*[$Resumen.$C$4]" office:value-type="float" office:value="88064.4440185561" calcext:value-type="float">
            <text:p>88064</text:p>
          </table:table-cell>
          <table:table-cell table:style-name="ce232" table:formula="of:=+[.M21]*[$Resumen.$C$4]" office:value-type="float" office:value="96174.2948747507" calcext:value-type="float">
            <text:p>96174</text:p>
          </table:table-cell>
          <table:table-cell table:style-name="ce232" table:formula="of:=+[.N21]*[$Resumen.$C$4]" office:value-type="float" office:value="154049.712931242" calcext:value-type="float">
            <text:p>154050</text:p>
          </table:table-cell>
          <table:table-cell table:style-name="ce234" table:formula="of:=SUM([.R21:.AC21])" office:value-type="float" office:value="1149018.2963259" calcext:value-type="float">
            <text:p>1149018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10" calcext:value-type="float">
            <text:p>10</text:p>
          </table:table-cell>
          <table:table-cell table:style-name="ce216" table:formula="of:=+[.$O$22]*[.C4]" office:value-type="float" office:value="7854.80603583946" calcext:value-type="float">
            <text:p>7,855</text:p>
          </table:table-cell>
          <table:table-cell table:style-name="ce216" table:formula="of:=+[.$O$22]*[.D4]" office:value-type="float" office:value="7929.67253605" calcext:value-type="float">
            <text:p>7,930</text:p>
          </table:table-cell>
          <table:table-cell table:style-name="ce216" table:formula="of:=+[.$O$22]*[.E4]" office:value-type="float" office:value="8041.97228636581" calcext:value-type="float">
            <text:p>8,042</text:p>
          </table:table-cell>
          <table:table-cell table:style-name="ce216" table:formula="of:=+[.$O$22]*[.F4]" office:value-type="float" office:value="8045.0605294995" calcext:value-type="float">
            <text:p>8,045</text:p>
          </table:table-cell>
          <table:table-cell table:style-name="ce216" table:formula="of:=+[.$O$22]*[.G4]" office:value-type="float" office:value="7933.37842781042" calcext:value-type="float">
            <text:p>7,933</text:p>
          </table:table-cell>
          <table:table-cell table:style-name="ce216" table:formula="of:=+[.$O$22]*[.H4]" office:value-type="float" office:value="7802.0532281286" calcext:value-type="float">
            <text:p>7,802</text:p>
          </table:table-cell>
          <table:table-cell table:style-name="ce216" table:formula="of:=+[.$O$22]*[.I4]" office:value-type="float" office:value="14224.6350400028" calcext:value-type="float">
            <text:p>14,225</text:p>
          </table:table-cell>
          <table:table-cell table:style-name="ce216" table:formula="of:=+[.$O$22]*[.J4]" office:value-type="float" office:value="8428.65775995326" calcext:value-type="float">
            <text:p>8,429</text:p>
          </table:table-cell>
          <table:table-cell table:style-name="ce216" table:formula="of:=+[.$O$22]*[.K4]" office:value-type="float" office:value="8540.95751026907" calcext:value-type="float">
            <text:p>8,541</text:p>
          </table:table-cell>
          <table:table-cell table:style-name="ce216" table:formula="of:=+[.$O$22]*[.L4]" office:value-type="float" office:value="8559.6741353217" calcext:value-type="float">
            <text:p>8,560</text:p>
          </table:table-cell>
          <table:table-cell table:style-name="ce216" table:formula="of:=+[.$O$22]*[.M4]" office:value-type="float" office:value="9347.93415772596" calcext:value-type="float">
            <text:p>9,348</text:p>
          </table:table-cell>
          <table:table-cell table:style-name="ce216" table:formula="of:=+[.$O$22]*[.N4]" office:value-type="float" office:value="14973.3000421082" calcext:value-type="float">
            <text:p>14,973</text:p>
          </table:table-cell>
          <table:table-cell table:style-name="ce227" table:formula="of:=+[.O21]*(1+[.$D$6])" office:value-type="float" office:value="111682.101689075" calcext:value-type="float">
            <text:p>111,682</text:p>
          </table:table-cell>
          <table:table-cell/>
          <table:table-cell table:style-name="ce206" office:value-type="float" office:value="10" calcext:value-type="float">
            <text:p>10</text:p>
          </table:table-cell>
          <table:table-cell table:style-name="ce232" table:formula="of:=+[.C22]*[$Resumen.$C$4]" office:value-type="float" office:value="86469.4325470801" calcext:value-type="float">
            <text:p>86469</text:p>
          </table:table-cell>
          <table:table-cell table:style-name="ce232" table:formula="of:=+[.D22]*[$Resumen.$C$4]" office:value-type="float" office:value="87293.5985112623" calcext:value-type="float">
            <text:p>87294</text:p>
          </table:table-cell>
          <table:table-cell table:style-name="ce232" table:formula="of:=+[.E22]*[$Resumen.$C$4]" office:value-type="float" office:value="88529.8474575355" calcext:value-type="float">
            <text:p>88530</text:p>
          </table:table-cell>
          <table:table-cell table:style-name="ce232" table:formula="of:=+[.F22]*[$Resumen.$C$4]" office:value-type="float" office:value="88563.844303558" calcext:value-type="float">
            <text:p>88564</text:p>
          </table:table-cell>
          <table:table-cell table:style-name="ce232" table:formula="of:=+[.G22]*[$Resumen.$C$4]" office:value-type="float" office:value="87334.3947264893" calcext:value-type="float">
            <text:p>87334</text:p>
          </table:table-cell>
          <table:table-cell table:style-name="ce232" table:formula="of:=+[.H22]*[$Resumen.$C$4]" office:value-type="float" office:value="85888.7046045683" calcext:value-type="float">
            <text:p>85889</text:p>
          </table:table-cell>
          <table:table-cell table:style-name="ce232" table:formula="of:=+[.I22]*[$Resumen.$C$4]" office:value-type="float" office:value="156591.533194607" calcext:value-type="float">
            <text:p>156592</text:p>
          </table:table-cell>
          <table:table-cell table:style-name="ce232" table:formula="of:=+[.J22]*[$Resumen.$C$4]" office:value-type="float" office:value="92786.6646625363" calcext:value-type="float">
            <text:p>92787</text:p>
          </table:table-cell>
          <table:table-cell table:style-name="ce232" table:formula="of:=+[.K22]*[$Resumen.$C$4]" office:value-type="float" office:value="94022.9136088095" calcext:value-type="float">
            <text:p>94023</text:p>
          </table:table-cell>
          <table:table-cell table:style-name="ce232" table:formula="of:=+[.L22]*[$Resumen.$C$4]" office:value-type="float" office:value="94228.955099855" calcext:value-type="float">
            <text:p>94229</text:p>
          </table:table-cell>
          <table:table-cell table:style-name="ce232" table:formula="of:=+[.M22]*[$Resumen.$C$4]" office:value-type="float" office:value="102906.495515983" calcext:value-type="float">
            <text:p>102906</text:p>
          </table:table-cell>
          <table:table-cell table:style-name="ce232" table:formula="of:=+[.N22]*[$Resumen.$C$4]" office:value-type="float" office:value="164833.192836429" calcext:value-type="float">
            <text:p>164833</text:p>
          </table:table-cell>
          <table:table-cell table:style-name="ce234" table:formula="of:=SUM([.R22:.AC22])" office:value-type="float" office:value="1229449.57706871" calcext:value-type="float">
            <text:p>1229450</text:p>
          </table:table-cell>
          <table:table-cell table:number-columns-repeated="16354"/>
        </table:table-row>
        <table:table-row table:style-name="ro8" table:number-rows-repeated="2">
          <table:table-cell/>
          <table:table-cell table:style-name="ce209"/>
          <table:table-cell table:number-columns-repeated="16382"/>
        </table:table-row>
        <table:table-row table:style-name="ro8">
          <table:table-cell/>
          <table:table-cell table:style-name="ce210" office:value-type="string" calcext:value-type="string" table:number-columns-spanned="14" table:number-rows-spanned="1">
            <text:p>Proyeccion de ventas en galones GASOHOL 90 PLUS</text:p>
          </table:table-cell>
          <table:covered-table-cell table:number-columns-repeated="13" table:style-name="ce210"/>
          <table:table-cell/>
          <table:table-cell table:style-name="ce210" office:value-type="string" calcext:value-type="string" table:number-columns-spanned="14" table:number-rows-spanned="1">
            <text:p>Proyeccion de ventas en soles GASOHOL 90 PLUS</text:p>
          </table:table-cell>
          <table:covered-table-cell table:number-columns-repeated="13" table:style-name="ce210"/>
          <table:table-cell table:number-columns-repeated="16354"/>
        </table:table-row>
        <table:table-row table:style-name="ro8">
          <table:table-cell/>
          <table:table-cell table:style-name="ce211" table:number-columns-repeated="14"/>
          <table:table-cell table:number-columns-repeated="16369"/>
        </table:table-row>
        <table:table-row table:style-name="ro8">
          <table:table-cell/>
          <table:table-cell table:style-name="ce208" office:value-type="string" calcext:value-type="string">
            <text:p>Año</text:p>
          </table:table-cell>
          <table:table-cell table:style-name="ce208" office:value-type="string" calcext:value-type="string">
            <text:p>Mes 1</text:p>
          </table:table-cell>
          <table:table-cell table:style-name="ce208" office:value-type="string" calcext:value-type="string">
            <text:p>Mes 2</text:p>
          </table:table-cell>
          <table:table-cell table:style-name="ce208" office:value-type="string" calcext:value-type="string">
            <text:p>Mes 3</text:p>
          </table:table-cell>
          <table:table-cell table:style-name="ce208" office:value-type="string" calcext:value-type="string">
            <text:p>Mes 4</text:p>
          </table:table-cell>
          <table:table-cell table:style-name="ce208" office:value-type="string" calcext:value-type="string">
            <text:p>Mes 5</text:p>
          </table:table-cell>
          <table:table-cell table:style-name="ce208" office:value-type="string" calcext:value-type="string">
            <text:p>Mes 6</text:p>
          </table:table-cell>
          <table:table-cell table:style-name="ce208" office:value-type="string" calcext:value-type="string">
            <text:p>Mes 7</text:p>
          </table:table-cell>
          <table:table-cell table:style-name="ce208" office:value-type="string" calcext:value-type="string">
            <text:p>Mes 8</text:p>
          </table:table-cell>
          <table:table-cell table:style-name="ce208" office:value-type="string" calcext:value-type="string">
            <text:p>Mes 9</text:p>
          </table:table-cell>
          <table:table-cell table:style-name="ce208" office:value-type="string" calcext:value-type="string">
            <text:p>Mes 10</text:p>
          </table:table-cell>
          <table:table-cell table:style-name="ce208" office:value-type="string" calcext:value-type="string">
            <text:p>Mes 11</text:p>
          </table:table-cell>
          <table:table-cell table:style-name="ce208" office:value-type="string" calcext:value-type="string">
            <text:p>Mes 12</text:p>
          </table:table-cell>
          <table:table-cell table:style-name="ce208" office:value-type="string" calcext:value-type="string">
            <text:p>TOTAL</text:p>
          </table:table-cell>
          <table:table-cell/>
          <table:table-cell table:style-name="ce208" office:value-type="string" calcext:value-type="string">
            <text:p>Año</text:p>
          </table:table-cell>
          <table:table-cell table:style-name="ce208" office:value-type="string" calcext:value-type="string">
            <text:p>Mes 1</text:p>
          </table:table-cell>
          <table:table-cell table:style-name="ce208" office:value-type="string" calcext:value-type="string">
            <text:p>Mes 2</text:p>
          </table:table-cell>
          <table:table-cell table:style-name="ce208" office:value-type="string" calcext:value-type="string">
            <text:p>Mes 3</text:p>
          </table:table-cell>
          <table:table-cell table:style-name="ce208" office:value-type="string" calcext:value-type="string">
            <text:p>Mes 4</text:p>
          </table:table-cell>
          <table:table-cell table:style-name="ce208" office:value-type="string" calcext:value-type="string">
            <text:p>Mes 5</text:p>
          </table:table-cell>
          <table:table-cell table:style-name="ce208" office:value-type="string" calcext:value-type="string">
            <text:p>Mes 6</text:p>
          </table:table-cell>
          <table:table-cell table:style-name="ce208" office:value-type="string" calcext:value-type="string">
            <text:p>Mes 7</text:p>
          </table:table-cell>
          <table:table-cell table:style-name="ce208" office:value-type="string" calcext:value-type="string">
            <text:p>Mes 8</text:p>
          </table:table-cell>
          <table:table-cell table:style-name="ce208" office:value-type="string" calcext:value-type="string">
            <text:p>Mes 9</text:p>
          </table:table-cell>
          <table:table-cell table:style-name="ce208" office:value-type="string" calcext:value-type="string">
            <text:p>Mes 10</text:p>
          </table:table-cell>
          <table:table-cell table:style-name="ce208" office:value-type="string" calcext:value-type="string">
            <text:p>Mes 11</text:p>
          </table:table-cell>
          <table:table-cell table:style-name="ce208" office:value-type="string" calcext:value-type="string">
            <text:p>Mes 12</text:p>
          </table:table-cell>
          <table:table-cell table:style-name="ce208" office:value-type="string" calcext:value-type="string">
            <text:p>TOTAL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1" calcext:value-type="float">
            <text:p>1</text:p>
          </table:table-cell>
          <table:table-cell table:style-name="ce217" table:formula="of:=+[.$O$28]*[.C4]" office:value-type="float" office:value="3164.93212669683" calcext:value-type="float">
            <text:p>3,165</text:p>
          </table:table-cell>
          <table:table-cell table:style-name="ce217" table:formula="of:=+[.$O$28]*[.D4]" office:value-type="float" office:value="3195.09803921569" calcext:value-type="float">
            <text:p>3,195</text:p>
          </table:table-cell>
          <table:table-cell table:style-name="ce217" table:formula="of:=+[.$O$28]*[.E4]" office:value-type="float" office:value="3240.34690799397" calcext:value-type="float">
            <text:p>3,240</text:p>
          </table:table-cell>
          <table:table-cell table:style-name="ce217" table:formula="of:=+[.$O$28]*[.F4]" office:value-type="float" office:value="3241.59125188537" calcext:value-type="float">
            <text:p>3,242</text:p>
          </table:table-cell>
          <table:table-cell table:style-name="ce217" table:formula="of:=+[.$O$28]*[.G4]" office:value-type="float" office:value="3196.59125188537" calcext:value-type="float">
            <text:p>3,197</text:p>
          </table:table-cell>
          <table:table-cell table:style-name="ce217" table:formula="of:=+[.$O$28]*[.H4]" office:value-type="float" office:value="3143.67647058824" calcext:value-type="float">
            <text:p>3,144</text:p>
          </table:table-cell>
          <table:table-cell table:style-name="ce217" table:formula="of:=+[.$O$28]*[.I4]" office:value-type="float" office:value="5731.5233785822" calcext:value-type="float">
            <text:p>5,732</text:p>
          </table:table-cell>
          <table:table-cell table:style-name="ce217" table:formula="of:=+[.$O$28]*[.J4]" office:value-type="float" office:value="3396.15384615385" calcext:value-type="float">
            <text:p>3,396</text:p>
          </table:table-cell>
          <table:table-cell table:style-name="ce217" table:formula="of:=+[.$O$28]*[.K4]" office:value-type="float" office:value="3441.40271493213" calcext:value-type="float">
            <text:p>3,441</text:p>
          </table:table-cell>
          <table:table-cell table:style-name="ce217" table:formula="of:=+[.$O$28]*[.L4]" office:value-type="float" office:value="3448.94419306184" calcext:value-type="float">
            <text:p>3,449</text:p>
          </table:table-cell>
          <table:table-cell table:style-name="ce217" table:formula="of:=+[.$O$28]*[.M4]" office:value-type="float" office:value="3766.55731523378" calcext:value-type="float">
            <text:p>3,767</text:p>
          </table:table-cell>
          <table:table-cell table:style-name="ce217" table:formula="of:=+[.$O$28]*[.N4]" office:value-type="float" office:value="6033.18250377074" calcext:value-type="float">
            <text:p>6,033</text:p>
          </table:table-cell>
          <table:table-cell table:style-name="ce228" office:value-type="float" office:value="45000" calcext:value-type="float">
            <text:p>45,000</text:p>
          </table:table-cell>
          <table:table-cell/>
          <table:table-cell table:style-name="ce206" office:value-type="float" office:value="1" calcext:value-type="float">
            <text:p>1</text:p>
          </table:table-cell>
          <table:table-cell table:style-name="ce218" table:formula="of:=+[.C28]*[$Resumen.$C$5]" office:value-type="float" office:value="34959.0892706496" calcext:value-type="float">
            <text:p>34959</text:p>
          </table:table-cell>
          <table:table-cell table:style-name="ce218" table:formula="of:=+[.D28]*[$Resumen.$C$5]" office:value-type="float" office:value="35292.2947823197" calcext:value-type="float">
            <text:p>35292</text:p>
          </table:table-cell>
          <table:table-cell table:style-name="ce218" table:formula="of:=+[.E28]*[$Resumen.$C$5]" office:value-type="float" office:value="35792.1030498249" calcext:value-type="float">
            <text:p>35792</text:p>
          </table:table-cell>
          <table:table-cell table:style-name="ce218" table:formula="of:=+[.F28]*[$Resumen.$C$5]" office:value-type="float" office:value="35805.8477771813" calcext:value-type="float">
            <text:p>35806</text:p>
          </table:table-cell>
          <table:table-cell table:style-name="ce218" table:formula="of:=+[.G28]*[$Resumen.$C$5]" office:value-type="float" office:value="35308.7884551474" calcext:value-type="float">
            <text:p>35309</text:p>
          </table:table-cell>
          <table:table-cell table:style-name="ce218" table:formula="of:=+[.H28]*[$Resumen.$C$5]" office:value-type="float" office:value="34724.304336989" calcext:value-type="float">
            <text:p>34724</text:p>
          </table:table-cell>
          <table:table-cell table:style-name="ce218" table:formula="of:=+[.I28]*[$Resumen.$C$5]" office:value-type="float" office:value="63309.0472173224" calcext:value-type="float">
            <text:p>63309</text:p>
          </table:table-cell>
          <table:table-cell table:style-name="ce218" table:formula="of:=+[.J28]*[$Resumen.$C$5]" office:value-type="float" office:value="37513.1095176011" calcext:value-type="float">
            <text:p>37513</text:p>
          </table:table-cell>
          <table:table-cell table:style-name="ce218" table:formula="of:=+[.K28]*[$Resumen.$C$5]" office:value-type="float" office:value="38012.9177851062" calcext:value-type="float">
            <text:p>38013</text:p>
          </table:table-cell>
          <table:table-cell table:style-name="ce218" table:formula="of:=+[.L28]*[$Resumen.$C$5]" office:value-type="float" office:value="38096.2191630237" calcext:value-type="float">
            <text:p>38096</text:p>
          </table:table-cell>
          <table:table-cell table:style-name="ce218" table:formula="of:=+[.M28]*[$Resumen.$C$5]" office:value-type="float" office:value="41604.4983447094" calcext:value-type="float">
            <text:p>41604</text:p>
          </table:table-cell>
          <table:table-cell table:style-name="ce218" table:formula="of:=+[.N28]*[$Resumen.$C$5]" office:value-type="float" office:value="66641.1023340236" calcext:value-type="float">
            <text:p>66641</text:p>
          </table:table-cell>
          <table:table-cell table:style-name="ce235" table:formula="of:=SUM([.R28:.AC28])" office:value-type="float" office:value="497059.322033898" calcext:value-type="float">
            <text:p>497059.3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2" calcext:value-type="float">
            <text:p>2</text:p>
          </table:table-cell>
          <table:table-cell table:style-name="ce217" table:formula="of:=+[.$O$29]*[.C4]" office:value-type="float" office:value="3657.25490196078" calcext:value-type="float">
            <text:p>3,657</text:p>
          </table:table-cell>
          <table:table-cell table:style-name="ce217" table:formula="of:=+[.$O$29]*[.D4]" office:value-type="float" office:value="3692.11328976035" calcext:value-type="float">
            <text:p>3,692</text:p>
          </table:table-cell>
          <table:table-cell table:style-name="ce217" table:formula="of:=+[.$O$29]*[.E4]" office:value-type="float" office:value="3744.4008714597" calcext:value-type="float">
            <text:p>3,744</text:p>
          </table:table-cell>
          <table:table-cell table:style-name="ce217" table:formula="of:=+[.$O$29]*[.F4]" office:value-type="float" office:value="3745.83877995643" calcext:value-type="float">
            <text:p>3,746</text:p>
          </table:table-cell>
          <table:table-cell table:style-name="ce217" table:formula="of:=+[.$O$29]*[.G4]" office:value-type="float" office:value="3693.83877995643" calcext:value-type="float">
            <text:p>3,694</text:p>
          </table:table-cell>
          <table:table-cell table:style-name="ce217" table:formula="of:=+[.$O$29]*[.H4]" office:value-type="float" office:value="3632.69281045752" calcext:value-type="float">
            <text:p>3,633</text:p>
          </table:table-cell>
          <table:table-cell table:style-name="ce217" table:formula="of:=+[.$O$29]*[.I4]" office:value-type="float" office:value="6623.09368191721" calcext:value-type="float">
            <text:p>6,623</text:p>
          </table:table-cell>
          <table:table-cell table:style-name="ce217" table:formula="of:=+[.$O$29]*[.J4]" office:value-type="float" office:value="3924.44444444445" calcext:value-type="float">
            <text:p>3,924</text:p>
          </table:table-cell>
          <table:table-cell table:style-name="ce217" table:formula="of:=+[.$O$29]*[.K4]" office:value-type="float" office:value="3976.73202614379" calcext:value-type="float">
            <text:p>3,977</text:p>
          </table:table-cell>
          <table:table-cell table:style-name="ce217" table:formula="of:=+[.$O$29]*[.L4]" office:value-type="float" office:value="3985.44662309368" calcext:value-type="float">
            <text:p>3,985</text:p>
          </table:table-cell>
          <table:table-cell table:style-name="ce217" table:formula="of:=+[.$O$29]*[.M4]" office:value-type="float" office:value="4352.46623093682" calcext:value-type="float">
            <text:p>4,352</text:p>
          </table:table-cell>
          <table:table-cell table:style-name="ce217" table:formula="of:=+[.$O$29]*[.N4]" office:value-type="float" office:value="6971.67755991285" calcext:value-type="float">
            <text:p>6,972</text:p>
          </table:table-cell>
          <table:table-cell table:style-name="ce228" office:value-type="float" office:value="52000" calcext:value-type="float">
            <text:p>52,000</text:p>
          </table:table-cell>
          <table:table-cell/>
          <table:table-cell table:style-name="ce206" office:value-type="float" office:value="2" calcext:value-type="float">
            <text:p>2</text:p>
          </table:table-cell>
          <table:table-cell table:style-name="ce218" table:formula="of:=+[.C29]*[$Resumen.$C$5]" office:value-type="float" office:value="40397.1698238618" calcext:value-type="float">
            <text:p>40397</text:p>
          </table:table-cell>
          <table:table-cell table:style-name="ce218" table:formula="of:=+[.D29]*[$Resumen.$C$5]" office:value-type="float" office:value="40782.2073040139" calcext:value-type="float">
            <text:p>40782</text:p>
          </table:table-cell>
          <table:table-cell table:style-name="ce218" table:formula="of:=+[.E29]*[$Resumen.$C$5]" office:value-type="float" office:value="41359.7635242421" calcext:value-type="float">
            <text:p>41360</text:p>
          </table:table-cell>
          <table:table-cell table:style-name="ce218" table:formula="of:=+[.F29]*[$Resumen.$C$5]" office:value-type="float" office:value="41375.6463202984" calcext:value-type="float">
            <text:p>41376</text:p>
          </table:table-cell>
          <table:table-cell table:style-name="ce218" table:formula="of:=+[.G29]*[$Resumen.$C$5]" office:value-type="float" office:value="40801.2666592814" calcext:value-type="float">
            <text:p>40801</text:p>
          </table:table-cell>
          <table:table-cell table:style-name="ce218" table:formula="of:=+[.H29]*[$Resumen.$C$5]" office:value-type="float" office:value="40125.8627894096" calcext:value-type="float">
            <text:p>40126</text:p>
          </table:table-cell>
          <table:table-cell table:style-name="ce218" table:formula="of:=+[.I29]*[$Resumen.$C$5]" office:value-type="float" office:value="73157.1212289059" calcext:value-type="float">
            <text:p>73157</text:p>
          </table:table-cell>
          <table:table-cell table:style-name="ce218" table:formula="of:=+[.J29]*[$Resumen.$C$5]" office:value-type="float" office:value="43348.4821092279" calcext:value-type="float">
            <text:p>43348</text:p>
          </table:table-cell>
          <table:table-cell table:style-name="ce218" table:formula="of:=+[.K29]*[$Resumen.$C$5]" office:value-type="float" office:value="43926.0383294561" calcext:value-type="float">
            <text:p>43926</text:p>
          </table:table-cell>
          <table:table-cell table:style-name="ce218" table:formula="of:=+[.L29]*[$Resumen.$C$5]" office:value-type="float" office:value="44022.2976994941" calcext:value-type="float">
            <text:p>44022</text:p>
          </table:table-cell>
          <table:table-cell table:style-name="ce218" table:formula="of:=+[.M29]*[$Resumen.$C$5]" office:value-type="float" office:value="48076.3091983309" calcext:value-type="float">
            <text:p>48076</text:p>
          </table:table-cell>
          <table:table-cell table:style-name="ce218" table:formula="of:=+[.N29]*[$Resumen.$C$5]" office:value-type="float" office:value="77007.4960304272" calcext:value-type="float">
            <text:p>77007</text:p>
          </table:table-cell>
          <table:table-cell table:style-name="ce235" table:formula="of:=SUM([.R29:.AC29])" office:value-type="float" office:value="574379.661016949" calcext:value-type="float">
            <text:p>574379.7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3" calcext:value-type="float">
            <text:p>3</text:p>
          </table:table-cell>
          <table:table-cell table:style-name="ce217" table:formula="of:=+[.$O$30]*[.C4]" office:value-type="float" office:value="3913.26274509804" calcext:value-type="float">
            <text:p>3,913</text:p>
          </table:table-cell>
          <table:table-cell table:style-name="ce217" table:formula="of:=+[.$O$30]*[.D4]" office:value-type="float" office:value="3950.56122004357" calcext:value-type="float">
            <text:p>3,951</text:p>
          </table:table-cell>
          <table:table-cell table:style-name="ce217" table:formula="of:=+[.$O$30]*[.E4]" office:value-type="float" office:value="4006.50893246187" calcext:value-type="float">
            <text:p>4,007</text:p>
          </table:table-cell>
          <table:table-cell table:style-name="ce217" table:formula="of:=+[.$O$30]*[.F4]" office:value-type="float" office:value="4008.04749455338" calcext:value-type="float">
            <text:p>4,008</text:p>
          </table:table-cell>
          <table:table-cell table:style-name="ce217" table:formula="of:=+[.$O$30]*[.G4]" office:value-type="float" office:value="3952.40749455338" calcext:value-type="float">
            <text:p>3,952</text:p>
          </table:table-cell>
          <table:table-cell table:style-name="ce217" table:formula="of:=+[.$O$30]*[.H4]" office:value-type="float" office:value="3886.98130718954" calcext:value-type="float">
            <text:p>3,887</text:p>
          </table:table-cell>
          <table:table-cell table:style-name="ce217" table:formula="of:=+[.$O$30]*[.I4]" office:value-type="float" office:value="7086.71023965142" calcext:value-type="float">
            <text:p>7,087</text:p>
          </table:table-cell>
          <table:table-cell table:style-name="ce217" table:formula="of:=+[.$O$30]*[.J4]" office:value-type="float" office:value="4199.15555555556" calcext:value-type="float">
            <text:p>4,199</text:p>
          </table:table-cell>
          <table:table-cell table:style-name="ce217" table:formula="of:=+[.$O$30]*[.K4]" office:value-type="float" office:value="4255.10326797386" calcext:value-type="float">
            <text:p>4,255</text:p>
          </table:table-cell>
          <table:table-cell table:style-name="ce217" table:formula="of:=+[.$O$30]*[.L4]" office:value-type="float" office:value="4264.42788671024" calcext:value-type="float">
            <text:p>4,264</text:p>
          </table:table-cell>
          <table:table-cell table:style-name="ce217" table:formula="of:=+[.$O$30]*[.M4]" office:value-type="float" office:value="4657.13886710239" calcext:value-type="float">
            <text:p>4,657</text:p>
          </table:table-cell>
          <table:table-cell table:style-name="ce217" table:formula="of:=+[.$O$30]*[.N4]" office:value-type="float" office:value="7459.69498910675" calcext:value-type="float">
            <text:p>7,460</text:p>
          </table:table-cell>
          <table:table-cell table:style-name="ce228" table:formula="of:=+[.O29]*(1+[.$D$6])" office:value-type="float" office:value="55640" calcext:value-type="float">
            <text:p>55,640</text:p>
          </table:table-cell>
          <table:table-cell/>
          <table:table-cell table:style-name="ce206" office:value-type="float" office:value="3" calcext:value-type="float">
            <text:p>3</text:p>
          </table:table-cell>
          <table:table-cell table:style-name="ce218" table:formula="of:=+[.C30]*[$Resumen.$C$5]" office:value-type="float" office:value="43224.9717115321" calcext:value-type="float">
            <text:p>43225</text:p>
          </table:table-cell>
          <table:table-cell table:style-name="ce218" table:formula="of:=+[.D30]*[$Resumen.$C$5]" office:value-type="float" office:value="43636.9618152949" calcext:value-type="float">
            <text:p>43637</text:p>
          </table:table-cell>
          <table:table-cell table:style-name="ce218" table:formula="of:=+[.E30]*[$Resumen.$C$5]" office:value-type="float" office:value="44254.946970939" calcext:value-type="float">
            <text:p>44255</text:p>
          </table:table-cell>
          <table:table-cell table:style-name="ce218" table:formula="of:=+[.F30]*[$Resumen.$C$5]" office:value-type="float" office:value="44271.9415627193" calcext:value-type="float">
            <text:p>44272</text:p>
          </table:table-cell>
          <table:table-cell table:style-name="ce218" table:formula="of:=+[.G30]*[$Resumen.$C$5]" office:value-type="float" office:value="43657.3553254311" calcext:value-type="float">
            <text:p>43657</text:p>
          </table:table-cell>
          <table:table-cell table:style-name="ce218" table:formula="of:=+[.H30]*[$Resumen.$C$5]" office:value-type="float" office:value="42934.6731846682" calcext:value-type="float">
            <text:p>42935</text:p>
          </table:table-cell>
          <table:table-cell table:style-name="ce218" table:formula="of:=+[.I30]*[$Resumen.$C$5]" office:value-type="float" office:value="78278.1197149293" calcext:value-type="float">
            <text:p>78278</text:p>
          </table:table-cell>
          <table:table-cell table:style-name="ce218" table:formula="of:=+[.J30]*[$Resumen.$C$5]" office:value-type="float" office:value="46382.8758568739" calcext:value-type="float">
            <text:p>46383</text:p>
          </table:table-cell>
          <table:table-cell table:style-name="ce218" table:formula="of:=+[.K30]*[$Resumen.$C$5]" office:value-type="float" office:value="47000.861012518" calcext:value-type="float">
            <text:p>47001</text:p>
          </table:table-cell>
          <table:table-cell table:style-name="ce218" table:formula="of:=+[.L30]*[$Resumen.$C$5]" office:value-type="float" office:value="47103.8585384587" calcext:value-type="float">
            <text:p>47104</text:p>
          </table:table-cell>
          <table:table-cell table:style-name="ce218" table:formula="of:=+[.M30]*[$Resumen.$C$5]" office:value-type="float" office:value="51441.6508422141" calcext:value-type="float">
            <text:p>51442</text:p>
          </table:table-cell>
          <table:table-cell table:style-name="ce218" table:formula="of:=+[.N30]*[$Resumen.$C$5]" office:value-type="float" office:value="82398.0207525572" calcext:value-type="float">
            <text:p>82398</text:p>
          </table:table-cell>
          <table:table-cell table:style-name="ce235" table:formula="of:=SUM([.R30:.AC30])" office:value-type="float" office:value="614586.237288136" calcext:value-type="float">
            <text:p>614586.2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4" calcext:value-type="float">
            <text:p>4</text:p>
          </table:table-cell>
          <table:table-cell table:style-name="ce217" table:formula="of:=+[.$O$31]*[.C4]" office:value-type="float" office:value="4187.1911372549" calcext:value-type="float">
            <text:p>4,187</text:p>
          </table:table-cell>
          <table:table-cell table:style-name="ce217" table:formula="of:=+[.$O$31]*[.D4]" office:value-type="float" office:value="4227.10050544663" calcext:value-type="float">
            <text:p>4,227</text:p>
          </table:table-cell>
          <table:table-cell table:style-name="ce217" table:formula="of:=+[.$O$31]*[.E4]" office:value-type="float" office:value="4286.96455773421" calcext:value-type="float">
            <text:p>4,287</text:p>
          </table:table-cell>
          <table:table-cell table:style-name="ce217" table:formula="of:=+[.$O$31]*[.F4]" office:value-type="float" office:value="4288.61081917211" calcext:value-type="float">
            <text:p>4,289</text:p>
          </table:table-cell>
          <table:table-cell table:style-name="ce217" table:formula="of:=+[.$O$31]*[.G4]" office:value-type="float" office:value="4229.07601917211" calcext:value-type="float">
            <text:p>4,229</text:p>
          </table:table-cell>
          <table:table-cell table:style-name="ce217" table:formula="of:=+[.$O$31]*[.H4]" office:value-type="float" office:value="4159.06999869281" calcext:value-type="float">
            <text:p>4,159</text:p>
          </table:table-cell>
          <table:table-cell table:style-name="ce217" table:formula="of:=+[.$O$31]*[.I4]" office:value-type="float" office:value="7582.77995642702" calcext:value-type="float">
            <text:p>7,583</text:p>
          </table:table-cell>
          <table:table-cell table:style-name="ce217" table:formula="of:=+[.$O$31]*[.J4]" office:value-type="float" office:value="4493.09644444445" calcext:value-type="float">
            <text:p>4,493</text:p>
          </table:table-cell>
          <table:table-cell table:style-name="ce217" table:formula="of:=+[.$O$31]*[.K4]" office:value-type="float" office:value="4552.96049673203" calcext:value-type="float">
            <text:p>4,553</text:p>
          </table:table-cell>
          <table:table-cell table:style-name="ce217" table:formula="of:=+[.$O$31]*[.L4]" office:value-type="float" office:value="4562.93783877996" calcext:value-type="float">
            <text:p>4,563</text:p>
          </table:table-cell>
          <table:table-cell table:style-name="ce217" table:formula="of:=+[.$O$31]*[.M4]" office:value-type="float" office:value="4983.13858779956" calcext:value-type="float">
            <text:p>4,983</text:p>
          </table:table-cell>
          <table:table-cell table:style-name="ce217" table:formula="of:=+[.$O$31]*[.N4]" office:value-type="float" office:value="7981.87363834423" calcext:value-type="float">
            <text:p>7,982</text:p>
          </table:table-cell>
          <table:table-cell table:style-name="ce228" table:formula="of:=+[.O30]*(1+[.$D$6])" office:value-type="float" office:value="59534.8" calcext:value-type="float">
            <text:p>59,535</text:p>
          </table:table-cell>
          <table:table-cell/>
          <table:table-cell table:style-name="ce206" office:value-type="float" office:value="4" calcext:value-type="float">
            <text:p>4</text:p>
          </table:table-cell>
          <table:table-cell table:style-name="ce218" table:formula="of:=+[.C31]*[$Resumen.$C$5]" office:value-type="float" office:value="46250.7197313393" calcext:value-type="float">
            <text:p>46251</text:p>
          </table:table-cell>
          <table:table-cell table:style-name="ce218" table:formula="of:=+[.D31]*[$Resumen.$C$5]" office:value-type="float" office:value="46691.5491423655" calcext:value-type="float">
            <text:p>46692</text:p>
          </table:table-cell>
          <table:table-cell table:style-name="ce218" table:formula="of:=+[.E31]*[$Resumen.$C$5]" office:value-type="float" office:value="47352.7932589048" calcext:value-type="float">
            <text:p>47353</text:p>
          </table:table-cell>
          <table:table-cell table:style-name="ce218" table:formula="of:=+[.F31]*[$Resumen.$C$5]" office:value-type="float" office:value="47370.9774721096" calcext:value-type="float">
            <text:p>47371</text:p>
          </table:table-cell>
          <table:table-cell table:style-name="ce218" table:formula="of:=+[.G31]*[$Resumen.$C$5]" office:value-type="float" office:value="46713.3701982113" calcext:value-type="float">
            <text:p>46713</text:p>
          </table:table-cell>
          <table:table-cell table:style-name="ce218" table:formula="of:=+[.H31]*[$Resumen.$C$5]" office:value-type="float" office:value="45940.100307595" calcext:value-type="float">
            <text:p>45940</text:p>
          </table:table-cell>
          <table:table-cell table:style-name="ce218" table:formula="of:=+[.I31]*[$Resumen.$C$5]" office:value-type="float" office:value="83757.5880949743" calcext:value-type="float">
            <text:p>83758</text:p>
          </table:table-cell>
          <table:table-cell table:style-name="ce218" table:formula="of:=+[.J31]*[$Resumen.$C$5]" office:value-type="float" office:value="49629.677166855" calcext:value-type="float">
            <text:p>49630</text:p>
          </table:table-cell>
          <table:table-cell table:style-name="ce218" table:formula="of:=+[.K31]*[$Resumen.$C$5]" office:value-type="float" office:value="50290.9212833943" calcext:value-type="float">
            <text:p>50291</text:p>
          </table:table-cell>
          <table:table-cell table:style-name="ce218" table:formula="of:=+[.L31]*[$Resumen.$C$5]" office:value-type="float" office:value="50401.1286361508" calcext:value-type="float">
            <text:p>50401</text:p>
          </table:table-cell>
          <table:table-cell table:style-name="ce218" table:formula="of:=+[.M31]*[$Resumen.$C$5]" office:value-type="float" office:value="55042.566401169" calcext:value-type="float">
            <text:p>55043</text:p>
          </table:table-cell>
          <table:table-cell table:style-name="ce218" table:formula="of:=+[.N31]*[$Resumen.$C$5]" office:value-type="float" office:value="88165.8822052362" calcext:value-type="float">
            <text:p>88166</text:p>
          </table:table-cell>
          <table:table-cell table:style-name="ce235" table:formula="of:=SUM([.R31:.AC31])" office:value-type="float" office:value="657607.273898305" calcext:value-type="float">
            <text:p>657607.3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5" calcext:value-type="float">
            <text:p>5</text:p>
          </table:table-cell>
          <table:table-cell table:style-name="ce217" table:formula="of:=+[.$O$32]*[.C4]" office:value-type="float" office:value="4480.29451686275" calcext:value-type="float">
            <text:p>4,480</text:p>
          </table:table-cell>
          <table:table-cell table:style-name="ce217" table:formula="of:=+[.$O$32]*[.D4]" office:value-type="float" office:value="4522.99754082789" calcext:value-type="float">
            <text:p>4,523</text:p>
          </table:table-cell>
          <table:table-cell table:style-name="ce217" table:formula="of:=+[.$O$32]*[.E4]" office:value-type="float" office:value="4587.0520767756" calcext:value-type="float">
            <text:p>4,587</text:p>
          </table:table-cell>
          <table:table-cell table:style-name="ce217" table:formula="of:=+[.$O$32]*[.F4]" office:value-type="float" office:value="4588.81357651416" calcext:value-type="float">
            <text:p>4,589</text:p>
          </table:table-cell>
          <table:table-cell table:style-name="ce217" table:formula="of:=+[.$O$32]*[.G4]" office:value-type="float" office:value="4525.11134051416" calcext:value-type="float">
            <text:p>4,525</text:p>
          </table:table-cell>
          <table:table-cell table:style-name="ce217" table:formula="of:=+[.$O$32]*[.H4]" office:value-type="float" office:value="4450.20489860131" calcext:value-type="float">
            <text:p>4,450</text:p>
          </table:table-cell>
          <table:table-cell table:style-name="ce217" table:formula="of:=+[.$O$32]*[.I4]" office:value-type="float" office:value="8113.57455337691" calcext:value-type="float">
            <text:p>8,114</text:p>
          </table:table-cell>
          <table:table-cell table:style-name="ce217" table:formula="of:=+[.$O$32]*[.J4]" office:value-type="float" office:value="4807.61319555556" calcext:value-type="float">
            <text:p>4,808</text:p>
          </table:table-cell>
          <table:table-cell table:style-name="ce217" table:formula="of:=+[.$O$32]*[.K4]" office:value-type="float" office:value="4871.66773150327" calcext:value-type="float">
            <text:p>4,872</text:p>
          </table:table-cell>
          <table:table-cell table:style-name="ce217" table:formula="of:=+[.$O$32]*[.L4]" office:value-type="float" office:value="4882.34348749455" calcext:value-type="float">
            <text:p>4,882</text:p>
          </table:table-cell>
          <table:table-cell table:style-name="ce217" table:formula="of:=+[.$O$32]*[.M4]" office:value-type="float" office:value="5331.95828894553" calcext:value-type="float">
            <text:p>5,332</text:p>
          </table:table-cell>
          <table:table-cell table:style-name="ce217" table:formula="of:=+[.$O$32]*[.N4]" office:value-type="float" office:value="8540.60479302832" calcext:value-type="float">
            <text:p>8,541</text:p>
          </table:table-cell>
          <table:table-cell table:style-name="ce228" table:formula="of:=+[.O31]*(1+[.$D$6])" office:value-type="float" office:value="63702.236" calcext:value-type="float">
            <text:p>63,702</text:p>
          </table:table-cell>
          <table:table-cell/>
          <table:table-cell table:style-name="ce206" office:value-type="float" office:value="5" calcext:value-type="float">
            <text:p>5</text:p>
          </table:table-cell>
          <table:table-cell table:style-name="ce218" table:formula="of:=+[.C32]*[$Resumen.$C$5]" office:value-type="float" office:value="49488.2701125331" calcext:value-type="float">
            <text:p>49488</text:p>
          </table:table-cell>
          <table:table-cell table:style-name="ce218" table:formula="of:=+[.D32]*[$Resumen.$C$5]" office:value-type="float" office:value="49959.9575823311" calcext:value-type="float">
            <text:p>49960</text:p>
          </table:table-cell>
          <table:table-cell table:style-name="ce218" table:formula="of:=+[.E32]*[$Resumen.$C$5]" office:value-type="float" office:value="50667.4887870281" calcext:value-type="float">
            <text:p>50667</text:p>
          </table:table-cell>
          <table:table-cell table:style-name="ce218" table:formula="of:=+[.F32]*[$Resumen.$C$5]" office:value-type="float" office:value="50686.9458951573" calcext:value-type="float">
            <text:p>50687</text:p>
          </table:table-cell>
          <table:table-cell table:style-name="ce218" table:formula="of:=+[.G32]*[$Resumen.$C$5]" office:value-type="float" office:value="49983.3061120861" calcext:value-type="float">
            <text:p>49983</text:p>
          </table:table-cell>
          <table:table-cell table:style-name="ce218" table:formula="of:=+[.H32]*[$Resumen.$C$5]" office:value-type="float" office:value="49155.9073291266" calcext:value-type="float">
            <text:p>49156</text:p>
          </table:table-cell>
          <table:table-cell table:style-name="ce218" table:formula="of:=+[.I32]*[$Resumen.$C$5]" office:value-type="float" office:value="89620.6192616226" calcext:value-type="float">
            <text:p>89621</text:p>
          </table:table-cell>
          <table:table-cell table:style-name="ce218" table:formula="of:=+[.J32]*[$Resumen.$C$5]" office:value-type="float" office:value="53103.7545685349" calcext:value-type="float">
            <text:p>53104</text:p>
          </table:table-cell>
          <table:table-cell table:style-name="ce218" table:formula="of:=+[.K32]*[$Resumen.$C$5]" office:value-type="float" office:value="53811.2857732319" calcext:value-type="float">
            <text:p>53811</text:p>
          </table:table-cell>
          <table:table-cell table:style-name="ce218" table:formula="of:=+[.L32]*[$Resumen.$C$5]" office:value-type="float" office:value="53929.2076406814" calcext:value-type="float">
            <text:p>53929</text:p>
          </table:table-cell>
          <table:table-cell table:style-name="ce218" table:formula="of:=+[.M32]*[$Resumen.$C$5]" office:value-type="float" office:value="58895.5460492509" calcext:value-type="float">
            <text:p>58896</text:p>
          </table:table-cell>
          <table:table-cell table:style-name="ce218" table:formula="of:=+[.N32]*[$Resumen.$C$5]" office:value-type="float" office:value="94337.4939596027" calcext:value-type="float">
            <text:p>94337</text:p>
          </table:table-cell>
          <table:table-cell table:style-name="ce235" table:formula="of:=SUM([.R32:.AC32])" office:value-type="float" office:value="703639.783071187" calcext:value-type="float">
            <text:p>703639.8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6" calcext:value-type="float">
            <text:p>6</text:p>
          </table:table-cell>
          <table:table-cell table:style-name="ce217" table:formula="of:=+[.$O$33]*[.C4]" office:value-type="float" office:value="4793.91513304314" calcext:value-type="float">
            <text:p>4,794</text:p>
          </table:table-cell>
          <table:table-cell table:style-name="ce217" table:formula="of:=+[.$O$33]*[.D4]" office:value-type="float" office:value="4839.60736868584" calcext:value-type="float">
            <text:p>4,840</text:p>
          </table:table-cell>
          <table:table-cell table:style-name="ce217" table:formula="of:=+[.$O$33]*[.E4]" office:value-type="float" office:value="4908.14572214989" calcext:value-type="float">
            <text:p>4,908</text:p>
          </table:table-cell>
          <table:table-cell table:style-name="ce217" table:formula="of:=+[.$O$33]*[.F4]" office:value-type="float" office:value="4910.03052687015" calcext:value-type="float">
            <text:p>4,910</text:p>
          </table:table-cell>
          <table:table-cell table:style-name="ce217" table:formula="of:=+[.$O$33]*[.G4]" office:value-type="float" office:value="4841.86913435015" calcext:value-type="float">
            <text:p>4,842</text:p>
          </table:table-cell>
          <table:table-cell table:style-name="ce217" table:formula="of:=+[.$O$33]*[.H4]" office:value-type="float" office:value="4761.7192415034" calcext:value-type="float">
            <text:p>4,762</text:p>
          </table:table-cell>
          <table:table-cell table:style-name="ce217" table:formula="of:=+[.$O$33]*[.I4]" office:value-type="float" office:value="8681.52477211329" calcext:value-type="float">
            <text:p>8,682</text:p>
          </table:table-cell>
          <table:table-cell table:style-name="ce217" table:formula="of:=+[.$O$33]*[.J4]" office:value-type="float" office:value="5144.14611924445" calcext:value-type="float">
            <text:p>5,144</text:p>
          </table:table-cell>
          <table:table-cell table:style-name="ce217" table:formula="of:=+[.$O$33]*[.K4]" office:value-type="float" office:value="5212.6844727085" calcext:value-type="float">
            <text:p>5,213</text:p>
          </table:table-cell>
          <table:table-cell table:style-name="ce217" table:formula="of:=+[.$O$33]*[.L4]" office:value-type="float" office:value="5224.10753161917" calcext:value-type="float">
            <text:p>5,224</text:p>
          </table:table-cell>
          <table:table-cell table:style-name="ce217" table:formula="of:=+[.$O$33]*[.M4]" office:value-type="float" office:value="5705.19536917172" calcext:value-type="float">
            <text:p>5,705</text:p>
          </table:table-cell>
          <table:table-cell table:style-name="ce217" table:formula="of:=+[.$O$33]*[.N4]" office:value-type="float" office:value="9138.44712854031" calcext:value-type="float">
            <text:p>9,138</text:p>
          </table:table-cell>
          <table:table-cell table:style-name="ce228" table:formula="of:=+[.O32]*(1+[.$D$6])" office:value-type="float" office:value="68161.39252" calcext:value-type="float">
            <text:p>68,161</text:p>
          </table:table-cell>
          <table:table-cell/>
          <table:table-cell table:style-name="ce206" office:value-type="float" office:value="6" calcext:value-type="float">
            <text:p>6</text:p>
          </table:table-cell>
          <table:table-cell table:style-name="ce218" table:formula="of:=+[.C33]*[$Resumen.$C$5]" office:value-type="float" office:value="52952.4490204104" calcext:value-type="float">
            <text:p>52952</text:p>
          </table:table-cell>
          <table:table-cell table:style-name="ce218" table:formula="of:=+[.D33]*[$Resumen.$C$5]" office:value-type="float" office:value="53457.1546130943" calcext:value-type="float">
            <text:p>53457</text:p>
          </table:table-cell>
          <table:table-cell table:style-name="ce218" table:formula="of:=+[.E33]*[$Resumen.$C$5]" office:value-type="float" office:value="54214.2130021201" calcext:value-type="float">
            <text:p>54214</text:p>
          </table:table-cell>
          <table:table-cell table:style-name="ce218" table:formula="of:=+[.F33]*[$Resumen.$C$5]" office:value-type="float" office:value="54235.0321078183" calcext:value-type="float">
            <text:p>54235</text:p>
          </table:table-cell>
          <table:table-cell table:style-name="ce218" table:formula="of:=+[.G33]*[$Resumen.$C$5]" office:value-type="float" office:value="53482.1375399321" calcext:value-type="float">
            <text:p>53482</text:p>
          </table:table-cell>
          <table:table-cell table:style-name="ce218" table:formula="of:=+[.H33]*[$Resumen.$C$5]" office:value-type="float" office:value="52596.8208421655" calcext:value-type="float">
            <text:p>52597</text:p>
          </table:table-cell>
          <table:table-cell table:style-name="ce218" table:formula="of:=+[.I33]*[$Resumen.$C$5]" office:value-type="float" office:value="95894.0626099361" calcext:value-type="float">
            <text:p>95894</text:p>
          </table:table-cell>
          <table:table-cell table:style-name="ce218" table:formula="of:=+[.J33]*[$Resumen.$C$5]" office:value-type="float" office:value="56821.0173883323" calcext:value-type="float">
            <text:p>56821</text:p>
          </table:table-cell>
          <table:table-cell table:style-name="ce218" table:formula="of:=+[.K33]*[$Resumen.$C$5]" office:value-type="float" office:value="57578.0757773581" calcext:value-type="float">
            <text:p>57578</text:p>
          </table:table-cell>
          <table:table-cell table:style-name="ce218" table:formula="of:=+[.L33]*[$Resumen.$C$5]" office:value-type="float" office:value="57704.2521755291" calcext:value-type="float">
            <text:p>57704</text:p>
          </table:table-cell>
          <table:table-cell table:style-name="ce218" table:formula="of:=+[.M33]*[$Resumen.$C$5]" office:value-type="float" office:value="63018.2342726984" calcext:value-type="float">
            <text:p>63018</text:p>
          </table:table-cell>
          <table:table-cell table:style-name="ce218" table:formula="of:=+[.N33]*[$Resumen.$C$5]" office:value-type="float" office:value="100941.118536775" calcext:value-type="float">
            <text:p>100941</text:p>
          </table:table-cell>
          <table:table-cell table:style-name="ce235" table:formula="of:=SUM([.R33:.AC33])" office:value-type="float" office:value="752894.56788617" calcext:value-type="float">
            <text:p>752894.6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7" calcext:value-type="float">
            <text:p>7</text:p>
          </table:table-cell>
          <table:table-cell table:style-name="ce217" table:formula="of:=+[.$O$34]*[.C4]" office:value-type="float" office:value="5129.48919235616" calcext:value-type="float">
            <text:p>5,129</text:p>
          </table:table-cell>
          <table:table-cell table:style-name="ce217" table:formula="of:=+[.$O$34]*[.D4]" office:value-type="float" office:value="5178.37988449385" calcext:value-type="float">
            <text:p>5,178</text:p>
          </table:table-cell>
          <table:table-cell table:style-name="ce217" table:formula="of:=+[.$O$34]*[.E4]" office:value-type="float" office:value="5251.71592270039" calcext:value-type="float">
            <text:p>5,252</text:p>
          </table:table-cell>
          <table:table-cell table:style-name="ce217" table:formula="of:=+[.$O$34]*[.F4]" office:value-type="float" office:value="5253.73266375106" calcext:value-type="float">
            <text:p>5,254</text:p>
          </table:table-cell>
          <table:table-cell table:style-name="ce217" table:formula="of:=+[.$O$34]*[.G4]" office:value-type="float" office:value="5180.79997375466" calcext:value-type="float">
            <text:p>5,181</text:p>
          </table:table-cell>
          <table:table-cell table:style-name="ce217" table:formula="of:=+[.$O$34]*[.H4]" office:value-type="float" office:value="5095.03958840864" calcext:value-type="float">
            <text:p>5,095</text:p>
          </table:table-cell>
          <table:table-cell table:style-name="ce217" table:formula="of:=+[.$O$34]*[.I4]" office:value-type="float" office:value="9289.23150616122" calcext:value-type="float">
            <text:p>9,289</text:p>
          </table:table-cell>
          <table:table-cell table:style-name="ce217" table:formula="of:=+[.$O$34]*[.J4]" office:value-type="float" office:value="5504.23634759156" calcext:value-type="float">
            <text:p>5,504</text:p>
          </table:table-cell>
          <table:table-cell table:style-name="ce217" table:formula="of:=+[.$O$34]*[.K4]" office:value-type="float" office:value="5577.57238579809" calcext:value-type="float">
            <text:p>5,578</text:p>
          </table:table-cell>
          <table:table-cell table:style-name="ce217" table:formula="of:=+[.$O$34]*[.L4]" office:value-type="float" office:value="5589.79505883252" calcext:value-type="float">
            <text:p>5,590</text:p>
          </table:table-cell>
          <table:table-cell table:style-name="ce217" table:formula="of:=+[.$O$34]*[.M4]" office:value-type="float" office:value="6104.55904501374" calcext:value-type="float">
            <text:p>6,105</text:p>
          </table:table-cell>
          <table:table-cell table:style-name="ce217" table:formula="of:=+[.$O$34]*[.N4]" office:value-type="float" office:value="9778.13842753813" calcext:value-type="float">
            <text:p>9,778</text:p>
          </table:table-cell>
          <table:table-cell table:style-name="ce228" table:formula="of:=+[.O33]*(1+[.$D$6])" office:value-type="float" office:value="72932.6899964" calcext:value-type="float">
            <text:p>72,933</text:p>
          </table:table-cell>
          <table:table-cell/>
          <table:table-cell table:style-name="ce206" office:value-type="float" office:value="7" calcext:value-type="float">
            <text:p>7</text:p>
          </table:table-cell>
          <table:table-cell table:style-name="ce218" table:formula="of:=+[.C34]*[$Resumen.$C$5]" office:value-type="float" office:value="56659.1204518391" calcext:value-type="float">
            <text:p>56659</text:p>
          </table:table-cell>
          <table:table-cell table:style-name="ce218" table:formula="of:=+[.D34]*[$Resumen.$C$5]" office:value-type="float" office:value="57199.1554360109" calcext:value-type="float">
            <text:p>57199</text:p>
          </table:table-cell>
          <table:table-cell table:style-name="ce218" table:formula="of:=+[.E34]*[$Resumen.$C$5]" office:value-type="float" office:value="58009.2079122685" calcext:value-type="float">
            <text:p>58009</text:p>
          </table:table-cell>
          <table:table-cell table:style-name="ce218" table:formula="of:=+[.F34]*[$Resumen.$C$5]" office:value-type="float" office:value="58031.4843553656" calcext:value-type="float">
            <text:p>58031</text:p>
          </table:table-cell>
          <table:table-cell table:style-name="ce218" table:formula="of:=+[.G34]*[$Resumen.$C$5]" office:value-type="float" office:value="57225.8871677274" calcext:value-type="float">
            <text:p>57226</text:p>
          </table:table-cell>
          <table:table-cell table:style-name="ce218" table:formula="of:=+[.H34]*[$Resumen.$C$5]" office:value-type="float" office:value="56278.5983011171" calcext:value-type="float">
            <text:p>56279</text:p>
          </table:table-cell>
          <table:table-cell table:style-name="ce218" table:formula="of:=+[.I34]*[$Resumen.$C$5]" office:value-type="float" office:value="102606.646992632" calcext:value-type="float">
            <text:p>102607</text:p>
          </table:table-cell>
          <table:table-cell table:style-name="ce218" table:formula="of:=+[.J34]*[$Resumen.$C$5]" office:value-type="float" office:value="60798.4886055156" calcext:value-type="float">
            <text:p>60798</text:p>
          </table:table-cell>
          <table:table-cell table:style-name="ce218" table:formula="of:=+[.K34]*[$Resumen.$C$5]" office:value-type="float" office:value="61608.5410817732" calcext:value-type="float">
            <text:p>61609</text:p>
          </table:table-cell>
          <table:table-cell table:style-name="ce218" table:formula="of:=+[.L34]*[$Resumen.$C$5]" office:value-type="float" office:value="61743.5498278161" calcext:value-type="float">
            <text:p>61744</text:p>
          </table:table-cell>
          <table:table-cell table:style-name="ce218" table:formula="of:=+[.M34]*[$Resumen.$C$5]" office:value-type="float" office:value="67429.5106717873" calcext:value-type="float">
            <text:p>67430</text:p>
          </table:table-cell>
          <table:table-cell table:style-name="ce218" table:formula="of:=+[.N34]*[$Resumen.$C$5]" office:value-type="float" office:value="108006.996834349" calcext:value-type="float">
            <text:p>108007</text:p>
          </table:table-cell>
          <table:table-cell table:style-name="ce235" table:formula="of:=SUM([.R34:.AC34])" office:value-type="float" office:value="805597.187638202" calcext:value-type="float">
            <text:p>805597.2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8" calcext:value-type="float">
            <text:p>8</text:p>
          </table:table-cell>
          <table:table-cell table:style-name="ce217" table:formula="of:=+[.$O$35]*[.C4]" office:value-type="float" office:value="5488.55343582109" calcext:value-type="float">
            <text:p>5,489</text:p>
          </table:table-cell>
          <table:table-cell table:style-name="ce217" table:formula="of:=+[.$O$35]*[.D4]" office:value-type="float" office:value="5540.86647640842" calcext:value-type="float">
            <text:p>5,541</text:p>
          </table:table-cell>
          <table:table-cell table:style-name="ce217" table:formula="of:=+[.$O$35]*[.E4]" office:value-type="float" office:value="5619.33603728941" calcext:value-type="float">
            <text:p>5,619</text:p>
          </table:table-cell>
          <table:table-cell table:style-name="ce217" table:formula="of:=+[.$O$35]*[.F4]" office:value-type="float" office:value="5621.49395021364" calcext:value-type="float">
            <text:p>5,621</text:p>
          </table:table-cell>
          <table:table-cell table:style-name="ce217" table:formula="of:=+[.$O$35]*[.G4]" office:value-type="float" office:value="5543.45597191749" calcext:value-type="float">
            <text:p>5,543</text:p>
          </table:table-cell>
          <table:table-cell table:style-name="ce217" table:formula="of:=+[.$O$35]*[.H4]" office:value-type="float" office:value="5451.69235959724" calcext:value-type="float">
            <text:p>5,452</text:p>
          </table:table-cell>
          <table:table-cell table:style-name="ce217" table:formula="of:=+[.$O$35]*[.I4]" office:value-type="float" office:value="9939.47771159251" calcext:value-type="float">
            <text:p>9,939</text:p>
          </table:table-cell>
          <table:table-cell table:style-name="ce217" table:formula="of:=+[.$O$35]*[.J4]" office:value-type="float" office:value="5889.53289192297" calcext:value-type="float">
            <text:p>5,890</text:p>
          </table:table-cell>
          <table:table-cell table:style-name="ce217" table:formula="of:=+[.$O$35]*[.K4]" office:value-type="float" office:value="5968.00245280396" calcext:value-type="float">
            <text:p>5,968</text:p>
          </table:table-cell>
          <table:table-cell table:style-name="ce217" table:formula="of:=+[.$O$35]*[.L4]" office:value-type="float" office:value="5981.08071295079" calcext:value-type="float">
            <text:p>5,981</text:p>
          </table:table-cell>
          <table:table-cell table:style-name="ce217" table:formula="of:=+[.$O$35]*[.M4]" office:value-type="float" office:value="6531.8781781647" calcext:value-type="float">
            <text:p>6,532</text:p>
          </table:table-cell>
          <table:table-cell table:style-name="ce217" table:formula="of:=+[.$O$35]*[.N4]" office:value-type="float" office:value="10462.6081174658" calcext:value-type="float">
            <text:p>10,463</text:p>
          </table:table-cell>
          <table:table-cell table:style-name="ce228" table:formula="of:=+[.O34]*(1+[.$D$6])" office:value-type="float" office:value="78037.978296148" calcext:value-type="float">
            <text:p>78,038</text:p>
          </table:table-cell>
          <table:table-cell/>
          <table:table-cell table:style-name="ce206" office:value-type="float" office:value="8" calcext:value-type="float">
            <text:p>8</text:p>
          </table:table-cell>
          <table:table-cell table:style-name="ce218" table:formula="of:=+[.C35]*[$Resumen.$C$5]" office:value-type="float" office:value="60625.2588834679" calcext:value-type="float">
            <text:p>60625</text:p>
          </table:table-cell>
          <table:table-cell table:style-name="ce218" table:formula="of:=+[.D35]*[$Resumen.$C$5]" office:value-type="float" office:value="61203.0963165317" calcext:value-type="float">
            <text:p>61203</text:p>
          </table:table-cell>
          <table:table-cell table:style-name="ce218" table:formula="of:=+[.E35]*[$Resumen.$C$5]" office:value-type="float" office:value="62069.8524661273" calcext:value-type="float">
            <text:p>62070</text:p>
          </table:table-cell>
          <table:table-cell table:style-name="ce218" table:formula="of:=+[.F35]*[$Resumen.$C$5]" office:value-type="float" office:value="62093.6882602412" calcext:value-type="float">
            <text:p>62094</text:p>
          </table:table-cell>
          <table:table-cell table:style-name="ce218" table:formula="of:=+[.G35]*[$Resumen.$C$5]" office:value-type="float" office:value="61231.6992694683" calcext:value-type="float">
            <text:p>61232</text:p>
          </table:table-cell>
          <table:table-cell table:style-name="ce218" table:formula="of:=+[.H35]*[$Resumen.$C$5]" office:value-type="float" office:value="60218.1001821953" calcext:value-type="float">
            <text:p>60218</text:p>
          </table:table-cell>
          <table:table-cell table:style-name="ce218" table:formula="of:=+[.I35]*[$Resumen.$C$5]" office:value-type="float" office:value="109789.112282116" calcext:value-type="float">
            <text:p>109789</text:p>
          </table:table-cell>
          <table:table-cell table:style-name="ce218" table:formula="of:=+[.J35]*[$Resumen.$C$5]" office:value-type="float" office:value="65054.3828079017" calcext:value-type="float">
            <text:p>65054</text:p>
          </table:table-cell>
          <table:table-cell table:style-name="ce218" table:formula="of:=+[.K35]*[$Resumen.$C$5]" office:value-type="float" office:value="65921.1389574973" calcext:value-type="float">
            <text:p>65921</text:p>
          </table:table-cell>
          <table:table-cell table:style-name="ce218" table:formula="of:=+[.L35]*[$Resumen.$C$5]" office:value-type="float" office:value="66065.5983157632" calcext:value-type="float">
            <text:p>66066</text:p>
          </table:table-cell>
          <table:table-cell table:style-name="ce218" table:formula="of:=+[.M35]*[$Resumen.$C$5]" office:value-type="float" office:value="72149.5764188125" calcext:value-type="float">
            <text:p>72150</text:p>
          </table:table-cell>
          <table:table-cell table:style-name="ce218" table:formula="of:=+[.N35]*[$Resumen.$C$5]" office:value-type="float" office:value="115567.486612754" calcext:value-type="float">
            <text:p>115567</text:p>
          </table:table-cell>
          <table:table-cell table:style-name="ce235" table:formula="of:=SUM([.R35:.AC35])" office:value-type="float" office:value="861988.990772876" calcext:value-type="float">
            <text:p>861989.0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9" calcext:value-type="float">
            <text:p>9</text:p>
          </table:table-cell>
          <table:table-cell table:style-name="ce217" table:formula="of:=+[.$O$36]*[.C4]" office:value-type="float" office:value="5872.75217632857" calcext:value-type="float">
            <text:p>5,873</text:p>
          </table:table-cell>
          <table:table-cell table:style-name="ce217" table:formula="of:=+[.$O$36]*[.D4]" office:value-type="float" office:value="5928.72712975701" calcext:value-type="float">
            <text:p>5,929</text:p>
          </table:table-cell>
          <table:table-cell table:style-name="ce217" table:formula="of:=+[.$O$36]*[.E4]" office:value-type="float" office:value="6012.68955989967" calcext:value-type="float">
            <text:p>6,013</text:p>
          </table:table-cell>
          <table:table-cell table:style-name="ce217" table:formula="of:=+[.$O$36]*[.F4]" office:value-type="float" office:value="6014.9985267286" calcext:value-type="float">
            <text:p>6,015</text:p>
          </table:table-cell>
          <table:table-cell table:style-name="ce217" table:formula="of:=+[.$O$36]*[.G4]" office:value-type="float" office:value="5931.49788995172" calcext:value-type="float">
            <text:p>5,931</text:p>
          </table:table-cell>
          <table:table-cell table:style-name="ce217" table:formula="of:=+[.$O$36]*[.H4]" office:value-type="float" office:value="5833.31082476905" calcext:value-type="float">
            <text:p>5,833</text:p>
          </table:table-cell>
          <table:table-cell table:style-name="ce217" table:formula="of:=+[.$O$36]*[.I4]" office:value-type="float" office:value="10635.241151404" calcext:value-type="float">
            <text:p>10,635</text:p>
          </table:table-cell>
          <table:table-cell table:style-name="ce217" table:formula="of:=+[.$O$36]*[.J4]" office:value-type="float" office:value="6301.80019435758" calcext:value-type="float">
            <text:p>6,302</text:p>
          </table:table-cell>
          <table:table-cell table:style-name="ce217" table:formula="of:=+[.$O$36]*[.K4]" office:value-type="float" office:value="6385.76262450024" calcext:value-type="float">
            <text:p>6,386</text:p>
          </table:table-cell>
          <table:table-cell table:style-name="ce217" table:formula="of:=+[.$O$36]*[.L4]" office:value-type="float" office:value="6399.75636285735" calcext:value-type="float">
            <text:p>6,400</text:p>
          </table:table-cell>
          <table:table-cell table:style-name="ce217" table:formula="of:=+[.$O$36]*[.M4]" office:value-type="float" office:value="6989.10965063623" calcext:value-type="float">
            <text:p>6,989</text:p>
          </table:table-cell>
          <table:table-cell table:style-name="ce217" table:formula="of:=+[.$O$36]*[.N4]" office:value-type="float" office:value="11194.9906856884" calcext:value-type="float">
            <text:p>11,195</text:p>
          </table:table-cell>
          <table:table-cell table:style-name="ce228" table:formula="of:=+[.O35]*(1+[.$D$6])" office:value-type="float" office:value="83500.6367768784" calcext:value-type="float">
            <text:p>83,501</text:p>
          </table:table-cell>
          <table:table-cell/>
          <table:table-cell table:style-name="ce206" office:value-type="float" office:value="9" calcext:value-type="float">
            <text:p>9</text:p>
          </table:table-cell>
          <table:table-cell table:style-name="ce218" table:formula="of:=+[.C36]*[$Resumen.$C$5]" office:value-type="float" office:value="64869.0270053106" calcext:value-type="float">
            <text:p>64869</text:p>
          </table:table-cell>
          <table:table-cell table:style-name="ce218" table:formula="of:=+[.D36]*[$Resumen.$C$5]" office:value-type="float" office:value="65487.3130586889" calcext:value-type="float">
            <text:p>65487</text:p>
          </table:table-cell>
          <table:table-cell table:style-name="ce218" table:formula="of:=+[.E36]*[$Resumen.$C$5]" office:value-type="float" office:value="66414.7421387562" calcext:value-type="float">
            <text:p>66415</text:p>
          </table:table-cell>
          <table:table-cell table:style-name="ce218" table:formula="of:=+[.F36]*[$Resumen.$C$5]" office:value-type="float" office:value="66440.2464384581" calcext:value-type="float">
            <text:p>66440</text:p>
          </table:table-cell>
          <table:table-cell table:style-name="ce218" table:formula="of:=+[.G36]*[$Resumen.$C$5]" office:value-type="float" office:value="65517.9182183311" calcext:value-type="float">
            <text:p>65518</text:p>
          </table:table-cell>
          <table:table-cell table:style-name="ce218" table:formula="of:=+[.H36]*[$Resumen.$C$5]" office:value-type="float" office:value="64433.367194949" calcext:value-type="float">
            <text:p>64433</text:p>
          </table:table-cell>
          <table:table-cell table:style-name="ce218" table:formula="of:=+[.I36]*[$Resumen.$C$5]" office:value-type="float" office:value="117474.350141864" calcext:value-type="float">
            <text:p>117474</text:p>
          </table:table-cell>
          <table:table-cell table:style-name="ce218" table:formula="of:=+[.J36]*[$Resumen.$C$5]" office:value-type="float" office:value="69608.1896044548" calcext:value-type="float">
            <text:p>69608</text:p>
          </table:table-cell>
          <table:table-cell table:style-name="ce218" table:formula="of:=+[.K36]*[$Resumen.$C$5]" office:value-type="float" office:value="70535.6186845221" calcext:value-type="float">
            <text:p>70536</text:p>
          </table:table-cell>
          <table:table-cell table:style-name="ce218" table:formula="of:=+[.L36]*[$Resumen.$C$5]" office:value-type="float" office:value="70690.1901978667" calcext:value-type="float">
            <text:p>70690</text:p>
          </table:table-cell>
          <table:table-cell table:style-name="ce218" table:formula="of:=+[.M36]*[$Resumen.$C$5]" office:value-type="float" office:value="77200.0467681293" calcext:value-type="float">
            <text:p>77200</text:p>
          </table:table-cell>
          <table:table-cell table:style-name="ce218" table:formula="of:=+[.N36]*[$Resumen.$C$5]" office:value-type="float" office:value="123657.210675646" calcext:value-type="float">
            <text:p>123657</text:p>
          </table:table-cell>
          <table:table-cell table:style-name="ce235" table:formula="of:=SUM([.R36:.AC36])" office:value-type="float" office:value="922328.220126977" calcext:value-type="float">
            <text:p>922328.2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10" calcext:value-type="float">
            <text:p>10</text:p>
          </table:table-cell>
          <table:table-cell table:style-name="ce217" table:formula="of:=+[.$O$37]*[.C4]" office:value-type="float" office:value="6283.84482867157" calcext:value-type="float">
            <text:p>6,284</text:p>
          </table:table-cell>
          <table:table-cell table:style-name="ce217" table:formula="of:=+[.$O$37]*[.D4]" office:value-type="float" office:value="6343.73802884" calcext:value-type="float">
            <text:p>6,344</text:p>
          </table:table-cell>
          <table:table-cell table:style-name="ce217" table:formula="of:=+[.$O$37]*[.E4]" office:value-type="float" office:value="6433.57782909265" calcext:value-type="float">
            <text:p>6,434</text:p>
          </table:table-cell>
          <table:table-cell table:style-name="ce217" table:formula="of:=+[.$O$37]*[.F4]" office:value-type="float" office:value="6436.0484235996" calcext:value-type="float">
            <text:p>6,436</text:p>
          </table:table-cell>
          <table:table-cell table:style-name="ce217" table:formula="of:=+[.$O$37]*[.G4]" office:value-type="float" office:value="6346.70274224834" calcext:value-type="float">
            <text:p>6,347</text:p>
          </table:table-cell>
          <table:table-cell table:style-name="ce217" table:formula="of:=+[.$O$37]*[.H4]" office:value-type="float" office:value="6241.64258250288" calcext:value-type="float">
            <text:p>6,242</text:p>
          </table:table-cell>
          <table:table-cell table:style-name="ce217" table:formula="of:=+[.$O$37]*[.I4]" office:value-type="float" office:value="11379.7080320023" calcext:value-type="float">
            <text:p>11,380</text:p>
          </table:table-cell>
          <table:table-cell table:style-name="ce217" table:formula="of:=+[.$O$37]*[.J4]" office:value-type="float" office:value="6742.92620796261" calcext:value-type="float">
            <text:p>6,743</text:p>
          </table:table-cell>
          <table:table-cell table:style-name="ce217" table:formula="of:=+[.$O$37]*[.K4]" office:value-type="float" office:value="6832.76600821526" calcext:value-type="float">
            <text:p>6,833</text:p>
          </table:table-cell>
          <table:table-cell table:style-name="ce217" table:formula="of:=+[.$O$37]*[.L4]" office:value-type="float" office:value="6847.73930825736" calcext:value-type="float">
            <text:p>6,848</text:p>
          </table:table-cell>
          <table:table-cell table:style-name="ce217" table:formula="of:=+[.$O$37]*[.M4]" office:value-type="float" office:value="7478.34732618077" calcext:value-type="float">
            <text:p>7,478</text:p>
          </table:table-cell>
          <table:table-cell table:style-name="ce217" table:formula="of:=+[.$O$37]*[.N4]" office:value-type="float" office:value="11978.6400336866" calcext:value-type="float">
            <text:p>11,979</text:p>
          </table:table-cell>
          <table:table-cell table:style-name="ce228" table:formula="of:=+[.O36]*(1+[.$D$6])" office:value-type="float" office:value="89345.6813512599" calcext:value-type="float">
            <text:p>89,346</text:p>
          </table:table-cell>
          <table:table-cell/>
          <table:table-cell table:style-name="ce206" office:value-type="float" office:value="10" calcext:value-type="float">
            <text:p>10</text:p>
          </table:table-cell>
          <table:table-cell table:style-name="ce218" table:formula="of:=+[.C37]*[$Resumen.$C$5]" office:value-type="float" office:value="69409.8588956824" calcext:value-type="float">
            <text:p>69410</text:p>
          </table:table-cell>
          <table:table-cell table:style-name="ce218" table:formula="of:=+[.D37]*[$Resumen.$C$5]" office:value-type="float" office:value="70071.4249727971" calcext:value-type="float">
            <text:p>70071</text:p>
          </table:table-cell>
          <table:table-cell table:style-name="ce218" table:formula="of:=+[.E37]*[$Resumen.$C$5]" office:value-type="float" office:value="71063.7740884691" calcext:value-type="float">
            <text:p>71064</text:p>
          </table:table-cell>
          <table:table-cell table:style-name="ce218" table:formula="of:=+[.F37]*[$Resumen.$C$5]" office:value-type="float" office:value="71091.0636891501" calcext:value-type="float">
            <text:p>71091</text:p>
          </table:table-cell>
          <table:table-cell table:style-name="ce218" table:formula="of:=+[.G37]*[$Resumen.$C$5]" office:value-type="float" office:value="70104.1724936143" calcext:value-type="float">
            <text:p>70104</text:p>
          </table:table-cell>
          <table:table-cell table:style-name="ce218" table:formula="of:=+[.H37]*[$Resumen.$C$5]" office:value-type="float" office:value="68943.7028985954" calcext:value-type="float">
            <text:p>68944</text:p>
          </table:table-cell>
          <table:table-cell table:style-name="ce218" table:formula="of:=+[.I37]*[$Resumen.$C$5]" office:value-type="float" office:value="125697.554651795" calcext:value-type="float">
            <text:p>125698</text:p>
          </table:table-cell>
          <table:table-cell table:style-name="ce218" table:formula="of:=+[.J37]*[$Resumen.$C$5]" office:value-type="float" office:value="74480.7628767667" calcext:value-type="float">
            <text:p>74481</text:p>
          </table:table-cell>
          <table:table-cell table:style-name="ce218" table:formula="of:=+[.K37]*[$Resumen.$C$5]" office:value-type="float" office:value="75473.1119924387" calcext:value-type="float">
            <text:p>75473</text:p>
          </table:table-cell>
          <table:table-cell table:style-name="ce218" table:formula="of:=+[.L37]*[$Resumen.$C$5]" office:value-type="float" office:value="75638.5035117173" calcext:value-type="float">
            <text:p>75639</text:p>
          </table:table-cell>
          <table:table-cell table:style-name="ce218" table:formula="of:=+[.M37]*[$Resumen.$C$5]" office:value-type="float" office:value="82604.0500418984" calcext:value-type="float">
            <text:p>82604</text:p>
          </table:table-cell>
          <table:table-cell table:style-name="ce218" table:formula="of:=+[.N37]*[$Resumen.$C$5]" office:value-type="float" office:value="132313.215422942" calcext:value-type="float">
            <text:p>132313</text:p>
          </table:table-cell>
          <table:table-cell table:style-name="ce235" table:formula="of:=SUM([.R37:.AC37])" office:value-type="float" office:value="986891.195535866" calcext:value-type="float">
            <text:p>986891.2</text:p>
          </table:table-cell>
          <table:table-cell table:number-columns-repeated="16354"/>
        </table:table-row>
        <table:table-row table:style-name="ro8" table:number-rows-repeated="2">
          <table:table-cell table:number-columns-repeated="16384"/>
        </table:table-row>
        <table:table-row table:style-name="ro8">
          <table:table-cell/>
          <table:table-cell table:style-name="ce207" office:value-type="string" calcext:value-type="string" table:number-columns-spanned="14" table:number-rows-spanned="1">
            <text:p>Proyeccion de ventas en galones 95 PLUS</text:p>
          </table:table-cell>
          <table:covered-table-cell table:number-columns-repeated="13" table:style-name="ce215"/>
          <table:table-cell/>
          <table:table-cell table:style-name="ce207" office:value-type="string" calcext:value-type="string" table:number-columns-spanned="14" table:number-rows-spanned="1">
            <text:p>Proyeccion de ventas en soles 95 PLUS</text:p>
          </table:table-cell>
          <table:covered-table-cell table:number-columns-repeated="13" table:style-name="ce215"/>
          <table:table-cell table:number-columns-repeated="16354"/>
        </table:table-row>
        <table:table-row table:style-name="ro8">
          <table:table-cell table:number-columns-repeated="16384"/>
        </table:table-row>
        <table:table-row table:style-name="ro8">
          <table:table-cell/>
          <table:table-cell table:style-name="ce212" office:value-type="string" calcext:value-type="string">
            <text:p>Año</text:p>
          </table:table-cell>
          <table:table-cell table:style-name="ce212" office:value-type="string" calcext:value-type="string">
            <text:p>Mes 1</text:p>
          </table:table-cell>
          <table:table-cell table:style-name="ce212" office:value-type="string" calcext:value-type="string">
            <text:p>Mes 2</text:p>
          </table:table-cell>
          <table:table-cell table:style-name="ce212" office:value-type="string" calcext:value-type="string">
            <text:p>Mes 3</text:p>
          </table:table-cell>
          <table:table-cell table:style-name="ce212" office:value-type="string" calcext:value-type="string">
            <text:p>Mes 4</text:p>
          </table:table-cell>
          <table:table-cell table:style-name="ce212" office:value-type="string" calcext:value-type="string">
            <text:p>Mes 5</text:p>
          </table:table-cell>
          <table:table-cell table:style-name="ce212" office:value-type="string" calcext:value-type="string">
            <text:p>Mes 6</text:p>
          </table:table-cell>
          <table:table-cell table:style-name="ce212" office:value-type="string" calcext:value-type="string">
            <text:p>Mes 7</text:p>
          </table:table-cell>
          <table:table-cell table:style-name="ce212" office:value-type="string" calcext:value-type="string">
            <text:p>Mes 8</text:p>
          </table:table-cell>
          <table:table-cell table:style-name="ce212" office:value-type="string" calcext:value-type="string">
            <text:p>Mes 9</text:p>
          </table:table-cell>
          <table:table-cell table:style-name="ce212" office:value-type="string" calcext:value-type="string">
            <text:p>Mes 10</text:p>
          </table:table-cell>
          <table:table-cell table:style-name="ce212" office:value-type="string" calcext:value-type="string">
            <text:p>Mes 11</text:p>
          </table:table-cell>
          <table:table-cell table:style-name="ce212" office:value-type="string" calcext:value-type="string">
            <text:p>Mes 12</text:p>
          </table:table-cell>
          <table:table-cell table:style-name="ce212" office:value-type="string" calcext:value-type="string">
            <text:p>TOTAL</text:p>
          </table:table-cell>
          <table:table-cell/>
          <table:table-cell table:style-name="ce212" office:value-type="string" calcext:value-type="string">
            <text:p>Año</text:p>
          </table:table-cell>
          <table:table-cell table:style-name="ce212" office:value-type="string" calcext:value-type="string">
            <text:p>Mes 1</text:p>
          </table:table-cell>
          <table:table-cell table:style-name="ce212" office:value-type="string" calcext:value-type="string">
            <text:p>Mes 2</text:p>
          </table:table-cell>
          <table:table-cell table:style-name="ce212" office:value-type="string" calcext:value-type="string">
            <text:p>Mes 3</text:p>
          </table:table-cell>
          <table:table-cell table:style-name="ce212" office:value-type="string" calcext:value-type="string">
            <text:p>Mes 4</text:p>
          </table:table-cell>
          <table:table-cell table:style-name="ce212" office:value-type="string" calcext:value-type="string">
            <text:p>Mes 5</text:p>
          </table:table-cell>
          <table:table-cell table:style-name="ce212" office:value-type="string" calcext:value-type="string">
            <text:p>Mes 6</text:p>
          </table:table-cell>
          <table:table-cell table:style-name="ce212" office:value-type="string" calcext:value-type="string">
            <text:p>Mes 7</text:p>
          </table:table-cell>
          <table:table-cell table:style-name="ce212" office:value-type="string" calcext:value-type="string">
            <text:p>Mes 8</text:p>
          </table:table-cell>
          <table:table-cell table:style-name="ce212" office:value-type="string" calcext:value-type="string">
            <text:p>Mes 9</text:p>
          </table:table-cell>
          <table:table-cell table:style-name="ce212" office:value-type="string" calcext:value-type="string">
            <text:p>Mes 10</text:p>
          </table:table-cell>
          <table:table-cell table:style-name="ce212" office:value-type="string" calcext:value-type="string">
            <text:p>Mes 11</text:p>
          </table:table-cell>
          <table:table-cell table:style-name="ce212" office:value-type="string" calcext:value-type="string">
            <text:p>Mes 12</text:p>
          </table:table-cell>
          <table:table-cell table:style-name="ce212" office:value-type="string" calcext:value-type="string">
            <text:p>TOTAL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1" calcext:value-type="float">
            <text:p>1</text:p>
          </table:table-cell>
          <table:table-cell table:style-name="ce217" table:formula="of:=+[.$O$43]*[.C4]" office:value-type="float" office:value="773.650075414781" calcext:value-type="float">
            <text:p>774</text:p>
          </table:table-cell>
          <table:table-cell table:style-name="ce217" table:formula="of:=+[.$O$43]*[.D4]" office:value-type="float" office:value="781.023965141613" calcext:value-type="float">
            <text:p>781</text:p>
          </table:table-cell>
          <table:table-cell table:style-name="ce217" table:formula="of:=+[.$O$43]*[.E4]" office:value-type="float" office:value="792.084799731859" calcext:value-type="float">
            <text:p>792</text:p>
          </table:table-cell>
          <table:table-cell table:style-name="ce217" table:formula="of:=+[.$O$43]*[.F4]" office:value-type="float" office:value="792.38897268309" calcext:value-type="float">
            <text:p>792</text:p>
          </table:table-cell>
          <table:table-cell table:style-name="ce217" table:formula="of:=+[.$O$43]*[.G4]" office:value-type="float" office:value="781.38897268309" calcext:value-type="float">
            <text:p>781</text:p>
          </table:table-cell>
          <table:table-cell table:style-name="ce217" table:formula="of:=+[.$O$43]*[.H4]" office:value-type="float" office:value="768.454248366013" calcext:value-type="float">
            <text:p>768</text:p>
          </table:table-cell>
          <table:table-cell table:style-name="ce217" table:formula="of:=+[.$O$43]*[.I4]" office:value-type="float" office:value="1401.03904809787" calcext:value-type="float">
            <text:p>1,401</text:p>
          </table:table-cell>
          <table:table-cell table:style-name="ce217" table:formula="of:=+[.$O$43]*[.J4]" office:value-type="float" office:value="830.170940170941" calcext:value-type="float">
            <text:p>830</text:p>
          </table:table-cell>
          <table:table-cell table:style-name="ce217" table:formula="of:=+[.$O$43]*[.K4]" office:value-type="float" office:value="841.231774761187" calcext:value-type="float">
            <text:p>841</text:p>
          </table:table-cell>
          <table:table-cell table:style-name="ce217" table:formula="of:=+[.$O$43]*[.L4]" office:value-type="float" office:value="843.075247192894" calcext:value-type="float">
            <text:p>843</text:p>
          </table:table-cell>
          <table:table-cell table:style-name="ce217" table:formula="of:=+[.$O$43]*[.M4]" office:value-type="float" office:value="920.71401039048" calcext:value-type="float">
            <text:p>921</text:p>
          </table:table-cell>
          <table:table-cell table:style-name="ce217" table:formula="of:=+[.$O$43]*[.N4]" office:value-type="float" office:value="1474.77794536618" calcext:value-type="float">
            <text:p>1,475</text:p>
          </table:table-cell>
          <table:table-cell table:style-name="ce228" office:value-type="float" office:value="11000" calcext:value-type="float">
            <text:p>11,000</text:p>
          </table:table-cell>
          <table:table-cell/>
          <table:table-cell table:style-name="ce206" office:value-type="float" office:value="1" calcext:value-type="float">
            <text:p>1</text:p>
          </table:table-cell>
          <table:table-cell table:style-name="ce218" table:formula="of:=+[.C43]*[$Resumen.$C$6]" office:value-type="float" office:value="9174.24418667076" calcext:value-type="float">
            <text:p>9174</text:p>
          </table:table-cell>
          <table:table-cell table:style-name="ce218" table:formula="of:=+[.D43]*[$Resumen.$C$6]" office:value-type="float" office:value="9261.6866456187" calcext:value-type="float">
            <text:p>9262</text:p>
          </table:table-cell>
          <table:table-cell table:style-name="ce218" table:formula="of:=+[.E43]*[$Resumen.$C$6]" office:value-type="float" office:value="9392.85033404061" calcext:value-type="float">
            <text:p>9393</text:p>
          </table:table-cell>
          <table:table-cell table:style-name="ce218" table:formula="of:=+[.F43]*[$Resumen.$C$6]" office:value-type="float" office:value="9396.45733547221" calcext:value-type="float">
            <text:p>9396</text:p>
          </table:table-cell>
          <table:table-cell table:style-name="ce218" table:formula="of:=+[.G43]*[$Resumen.$C$6]" office:value-type="float" office:value="9266.01504733662" calcext:value-type="float">
            <text:p>9266</text:p>
          </table:table-cell>
          <table:table-cell table:style-name="ce218" table:formula="of:=+[.H43]*[$Resumen.$C$6]" office:value-type="float" office:value="9112.63004403456" calcext:value-type="float">
            <text:p>9113</text:p>
          </table:table-cell>
          <table:table-cell table:style-name="ce218" table:formula="of:=+[.I43]*[$Resumen.$C$6]" office:value-type="float" office:value="16614.0672001091" calcext:value-type="float">
            <text:p>16614</text:p>
          </table:table-cell>
          <table:table-cell table:style-name="ce218" table:formula="of:=+[.J43]*[$Resumen.$C$6]" office:value-type="float" office:value="9844.49063450674" calcext:value-type="float">
            <text:p>9844</text:p>
          </table:table-cell>
          <table:table-cell table:style-name="ce218" table:formula="of:=+[.K43]*[$Resumen.$C$6]" office:value-type="float" office:value="9975.65432292865" calcext:value-type="float">
            <text:p>9976</text:p>
          </table:table-cell>
          <table:table-cell table:style-name="ce218" table:formula="of:=+[.L43]*[$Resumen.$C$6]" office:value-type="float" office:value="9997.51493766563" calcext:value-type="float">
            <text:p>9998</text:p>
          </table:table-cell>
          <table:table-cell table:style-name="ce218" table:formula="of:=+[.M43]*[$Resumen.$C$6]" office:value-type="float" office:value="10918.1856576211" calcext:value-type="float">
            <text:p>10918</text:p>
          </table:table-cell>
          <table:table-cell table:style-name="ce218" table:formula="of:=+[.N43]*[$Resumen.$C$6]" office:value-type="float" office:value="17488.4917895885" calcext:value-type="float">
            <text:p>17488</text:p>
          </table:table-cell>
          <table:table-cell table:style-name="ce225" table:formula="of:=SUM([.R43:.AC43])" office:value-type="float" office:value="130442.288135593" calcext:value-type="float">
            <text:p>130442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2" calcext:value-type="float">
            <text:p>2</text:p>
          </table:table-cell>
          <table:table-cell table:style-name="ce217" table:formula="of:=+[.$O$44]*[.C4]" office:value-type="float" office:value="843.981900452489" calcext:value-type="float">
            <text:p>844</text:p>
          </table:table-cell>
          <table:table-cell table:style-name="ce217" table:formula="of:=+[.$O$44]*[.D4]" office:value-type="float" office:value="852.02614379085" calcext:value-type="float">
            <text:p>852</text:p>
          </table:table-cell>
          <table:table-cell table:style-name="ce217" table:formula="of:=+[.$O$44]*[.E4]" office:value-type="float" office:value="864.092508798391" calcext:value-type="float">
            <text:p>864</text:p>
          </table:table-cell>
          <table:table-cell table:style-name="ce217" table:formula="of:=+[.$O$44]*[.F4]" office:value-type="float" office:value="864.424333836099" calcext:value-type="float">
            <text:p>864</text:p>
          </table:table-cell>
          <table:table-cell table:style-name="ce217" table:formula="of:=+[.$O$44]*[.G4]" office:value-type="float" office:value="852.424333836099" calcext:value-type="float">
            <text:p>852</text:p>
          </table:table-cell>
          <table:table-cell table:style-name="ce217" table:formula="of:=+[.$O$44]*[.H4]" office:value-type="float" office:value="838.313725490196" calcext:value-type="float">
            <text:p>838</text:p>
          </table:table-cell>
          <table:table-cell table:style-name="ce217" table:formula="of:=+[.$O$44]*[.I4]" office:value-type="float" office:value="1528.40623428859" calcext:value-type="float">
            <text:p>1,528</text:p>
          </table:table-cell>
          <table:table-cell table:style-name="ce217" table:formula="of:=+[.$O$44]*[.J4]" office:value-type="float" office:value="905.641025641026" calcext:value-type="float">
            <text:p>906</text:p>
          </table:table-cell>
          <table:table-cell table:style-name="ce217" table:formula="of:=+[.$O$44]*[.K4]" office:value-type="float" office:value="917.707390648567" calcext:value-type="float">
            <text:p>918</text:p>
          </table:table-cell>
          <table:table-cell table:style-name="ce217" table:formula="of:=+[.$O$44]*[.L4]" office:value-type="float" office:value="919.718451483157" calcext:value-type="float">
            <text:p>920</text:p>
          </table:table-cell>
          <table:table-cell table:style-name="ce217" table:formula="of:=+[.$O$44]*[.M4]" office:value-type="float" office:value="1004.41528406234" calcext:value-type="float">
            <text:p>1,004</text:p>
          </table:table-cell>
          <table:table-cell table:style-name="ce217" table:formula="of:=+[.$O$44]*[.N4]" office:value-type="float" office:value="1608.8486676722" calcext:value-type="float">
            <text:p>1,609</text:p>
          </table:table-cell>
          <table:table-cell table:style-name="ce228" office:value-type="float" office:value="12000" calcext:value-type="float">
            <text:p>12,000</text:p>
          </table:table-cell>
          <table:table-cell/>
          <table:table-cell table:style-name="ce206" office:value-type="float" office:value="2" calcext:value-type="float">
            <text:p>2</text:p>
          </table:table-cell>
          <table:table-cell table:style-name="ce218" table:formula="of:=+[.C44]*[$Resumen.$C$6]" office:value-type="float" office:value="10008.266385459" calcext:value-type="float">
            <text:p>10008</text:p>
          </table:table-cell>
          <table:table-cell table:style-name="ce218" table:formula="of:=+[.D44]*[$Resumen.$C$6]" office:value-type="float" office:value="10103.6581588568" calcext:value-type="float">
            <text:p>10104</text:p>
          </table:table-cell>
          <table:table-cell table:style-name="ce218" table:formula="of:=+[.E44]*[$Resumen.$C$6]" office:value-type="float" office:value="10246.7458189534" calcext:value-type="float">
            <text:p>10247</text:p>
          </table:table-cell>
          <table:table-cell table:style-name="ce218" table:formula="of:=+[.F44]*[$Resumen.$C$6]" office:value-type="float" office:value="10250.6807296061" calcext:value-type="float">
            <text:p>10251</text:p>
          </table:table-cell>
          <table:table-cell table:style-name="ce218" table:formula="of:=+[.G44]*[$Resumen.$C$6]" office:value-type="float" office:value="10108.38005164" calcext:value-type="float">
            <text:p>10108</text:p>
          </table:table-cell>
          <table:table-cell table:style-name="ce218" table:formula="of:=+[.H44]*[$Resumen.$C$6]" office:value-type="float" office:value="9941.05095712861" calcext:value-type="float">
            <text:p>9941</text:p>
          </table:table-cell>
          <table:table-cell table:style-name="ce218" table:formula="of:=+[.I44]*[$Resumen.$C$6]" office:value-type="float" office:value="18124.4369455735" calcext:value-type="float">
            <text:p>18124</text:p>
          </table:table-cell>
          <table:table-cell table:style-name="ce218" table:formula="of:=+[.J44]*[$Resumen.$C$6]" office:value-type="float" office:value="10739.4443285528" calcext:value-type="float">
            <text:p>10739</text:p>
          </table:table-cell>
          <table:table-cell table:style-name="ce218" table:formula="of:=+[.K44]*[$Resumen.$C$6]" office:value-type="float" office:value="10882.5319886494" calcext:value-type="float">
            <text:p>10883</text:p>
          </table:table-cell>
          <table:table-cell table:style-name="ce218" table:formula="of:=+[.L44]*[$Resumen.$C$6]" office:value-type="float" office:value="10906.3799319989" calcext:value-type="float">
            <text:p>10906</text:p>
          </table:table-cell>
          <table:table-cell table:style-name="ce218" table:formula="of:=+[.M44]*[$Resumen.$C$6]" office:value-type="float" office:value="11910.7479901322" calcext:value-type="float">
            <text:p>11911</text:p>
          </table:table-cell>
          <table:table-cell table:style-name="ce218" table:formula="of:=+[.N44]*[$Resumen.$C$6]" office:value-type="float" office:value="19078.3546795511" calcext:value-type="float">
            <text:p>19078</text:p>
          </table:table-cell>
          <table:table-cell table:style-name="ce225" table:formula="of:=SUM([.R44:.AC44])" office:value-type="float" office:value="142300.677966102" calcext:value-type="float">
            <text:p>142301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3" calcext:value-type="float">
            <text:p>3</text:p>
          </table:table-cell>
          <table:table-cell table:style-name="ce217" table:formula="of:=+[.$O$45]*[.C4]" office:value-type="float" office:value="903.060633484163" calcext:value-type="float">
            <text:p>903</text:p>
          </table:table-cell>
          <table:table-cell table:style-name="ce217" table:formula="of:=+[.$O$45]*[.D4]" office:value-type="float" office:value="911.667973856209" calcext:value-type="float">
            <text:p>912</text:p>
          </table:table-cell>
          <table:table-cell table:style-name="ce217" table:formula="of:=+[.$O$45]*[.E4]" office:value-type="float" office:value="924.578984414279" calcext:value-type="float">
            <text:p>925</text:p>
          </table:table-cell>
          <table:table-cell table:style-name="ce217" table:formula="of:=+[.$O$45]*[.F4]" office:value-type="float" office:value="924.934037204625" calcext:value-type="float">
            <text:p>925</text:p>
          </table:table-cell>
          <table:table-cell table:style-name="ce217" table:formula="of:=+[.$O$45]*[.G4]" office:value-type="float" office:value="912.094037204625" calcext:value-type="float">
            <text:p>912</text:p>
          </table:table-cell>
          <table:table-cell table:style-name="ce217" table:formula="of:=+[.$O$45]*[.H4]" office:value-type="float" office:value="896.99568627451" calcext:value-type="float">
            <text:p>897</text:p>
          </table:table-cell>
          <table:table-cell table:style-name="ce217" table:formula="of:=+[.$O$45]*[.I4]" office:value-type="float" office:value="1635.39467068879" calcext:value-type="float">
            <text:p>1,635</text:p>
          </table:table-cell>
          <table:table-cell table:style-name="ce217" table:formula="of:=+[.$O$45]*[.J4]" office:value-type="float" office:value="969.035897435898" calcext:value-type="float">
            <text:p>969</text:p>
          </table:table-cell>
          <table:table-cell table:style-name="ce217" table:formula="of:=+[.$O$45]*[.K4]" office:value-type="float" office:value="981.946907993967" calcext:value-type="float">
            <text:p>982</text:p>
          </table:table-cell>
          <table:table-cell table:style-name="ce217" table:formula="of:=+[.$O$45]*[.L4]" office:value-type="float" office:value="984.098743086978" calcext:value-type="float">
            <text:p>984</text:p>
          </table:table-cell>
          <table:table-cell table:style-name="ce217" table:formula="of:=+[.$O$45]*[.M4]" office:value-type="float" office:value="1074.72435394671" calcext:value-type="float">
            <text:p>1,075</text:p>
          </table:table-cell>
          <table:table-cell table:style-name="ce217" table:formula="of:=+[.$O$45]*[.N4]" office:value-type="float" office:value="1721.46807440925" calcext:value-type="float">
            <text:p>1,721</text:p>
          </table:table-cell>
          <table:table-cell table:style-name="ce228" table:formula="of:=+[.O44]*(1+[.$D$6])" office:value-type="float" office:value="12840" calcext:value-type="float">
            <text:p>12,840</text:p>
          </table:table-cell>
          <table:table-cell/>
          <table:table-cell table:style-name="ce206" office:value-type="float" office:value="3" calcext:value-type="float">
            <text:p>3</text:p>
          </table:table-cell>
          <table:table-cell table:style-name="ce218" table:formula="of:=+[.C45]*[$Resumen.$C$6]" office:value-type="float" office:value="10708.8450324411" calcext:value-type="float">
            <text:p>10709</text:p>
          </table:table-cell>
          <table:table-cell table:style-name="ce218" table:formula="of:=+[.D45]*[$Resumen.$C$6]" office:value-type="float" office:value="10810.9142299767" calcext:value-type="float">
            <text:p>10811</text:p>
          </table:table-cell>
          <table:table-cell table:style-name="ce218" table:formula="of:=+[.E45]*[$Resumen.$C$6]" office:value-type="float" office:value="10964.0180262801" calcext:value-type="float">
            <text:p>10964</text:p>
          </table:table-cell>
          <table:table-cell table:style-name="ce218" table:formula="of:=+[.F45]*[$Resumen.$C$6]" office:value-type="float" office:value="10968.2283806785" calcext:value-type="float">
            <text:p>10968</text:p>
          </table:table-cell>
          <table:table-cell table:style-name="ce218" table:formula="of:=+[.G45]*[$Resumen.$C$6]" office:value-type="float" office:value="10815.9666552547" calcext:value-type="float">
            <text:p>10816</text:p>
          </table:table-cell>
          <table:table-cell table:style-name="ce218" table:formula="of:=+[.H45]*[$Resumen.$C$6]" office:value-type="float" office:value="10636.9245241276" calcext:value-type="float">
            <text:p>10637</text:p>
          </table:table-cell>
          <table:table-cell table:style-name="ce218" table:formula="of:=+[.I45]*[$Resumen.$C$6]" office:value-type="float" office:value="19393.1475317637" calcext:value-type="float">
            <text:p>19393</text:p>
          </table:table-cell>
          <table:table-cell table:style-name="ce218" table:formula="of:=+[.J45]*[$Resumen.$C$6]" office:value-type="float" office:value="11491.2054315515" calcext:value-type="float">
            <text:p>11491</text:p>
          </table:table-cell>
          <table:table-cell table:style-name="ce218" table:formula="of:=+[.K45]*[$Resumen.$C$6]" office:value-type="float" office:value="11644.3092278549" calcext:value-type="float">
            <text:p>11644</text:p>
          </table:table-cell>
          <table:table-cell table:style-name="ce218" table:formula="of:=+[.L45]*[$Resumen.$C$6]" office:value-type="float" office:value="11669.8265272388" calcext:value-type="float">
            <text:p>11670</text:p>
          </table:table-cell>
          <table:table-cell table:style-name="ce218" table:formula="of:=+[.M45]*[$Resumen.$C$6]" office:value-type="float" office:value="12744.5003494414" calcext:value-type="float">
            <text:p>12745</text:p>
          </table:table-cell>
          <table:table-cell table:style-name="ce218" table:formula="of:=+[.N45]*[$Resumen.$C$6]" office:value-type="float" office:value="20413.8395071197" calcext:value-type="float">
            <text:p>20414</text:p>
          </table:table-cell>
          <table:table-cell table:style-name="ce225" table:formula="of:=SUM([.R45:.AC45])" office:value-type="float" office:value="152261.725423729" calcext:value-type="float">
            <text:p>152262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4" calcext:value-type="float">
            <text:p>4</text:p>
          </table:table-cell>
          <table:table-cell table:style-name="ce217" table:formula="of:=+[.$O$46]*[.C4]" office:value-type="float" office:value="966.274877828054" calcext:value-type="float">
            <text:p>966</text:p>
          </table:table-cell>
          <table:table-cell table:style-name="ce217" table:formula="of:=+[.$O$46]*[.D4]" office:value-type="float" office:value="975.484732026144" calcext:value-type="float">
            <text:p>975</text:p>
          </table:table-cell>
          <table:table-cell table:style-name="ce217" table:formula="of:=+[.$O$46]*[.E4]" office:value-type="float" office:value="989.299513323278" calcext:value-type="float">
            <text:p>989</text:p>
          </table:table-cell>
          <table:table-cell table:style-name="ce217" table:formula="of:=+[.$O$46]*[.F4]" office:value-type="float" office:value="989.679419808949" calcext:value-type="float">
            <text:p>990</text:p>
          </table:table-cell>
          <table:table-cell table:style-name="ce217" table:formula="of:=+[.$O$46]*[.G4]" office:value-type="float" office:value="975.940619808949" calcext:value-type="float">
            <text:p>976</text:p>
          </table:table-cell>
          <table:table-cell table:style-name="ce217" table:formula="of:=+[.$O$46]*[.H4]" office:value-type="float" office:value="959.785384313725" calcext:value-type="float">
            <text:p>960</text:p>
          </table:table-cell>
          <table:table-cell table:style-name="ce217" table:formula="of:=+[.$O$46]*[.I4]" office:value-type="float" office:value="1749.872297637" calcext:value-type="float">
            <text:p>1,750</text:p>
          </table:table-cell>
          <table:table-cell table:style-name="ce217" table:formula="of:=+[.$O$46]*[.J4]" office:value-type="float" office:value="1036.86841025641" calcext:value-type="float">
            <text:p>1,037</text:p>
          </table:table-cell>
          <table:table-cell table:style-name="ce217" table:formula="of:=+[.$O$46]*[.K4]" office:value-type="float" office:value="1050.68319155354" calcext:value-type="float">
            <text:p>1,051</text:p>
          </table:table-cell>
          <table:table-cell table:style-name="ce217" table:formula="of:=+[.$O$46]*[.L4]" office:value-type="float" office:value="1052.98565510307" calcext:value-type="float">
            <text:p>1,053</text:p>
          </table:table-cell>
          <table:table-cell table:style-name="ce217" table:formula="of:=+[.$O$46]*[.M4]" office:value-type="float" office:value="1149.95505872298" calcext:value-type="float">
            <text:p>1,150</text:p>
          </table:table-cell>
          <table:table-cell table:style-name="ce217" table:formula="of:=+[.$O$46]*[.N4]" office:value-type="float" office:value="1841.9708396179" calcext:value-type="float">
            <text:p>1,842</text:p>
          </table:table-cell>
          <table:table-cell table:style-name="ce228" table:formula="of:=+[.O45]*(1+[.$D$6])" office:value-type="float" office:value="13738.8" calcext:value-type="float">
            <text:p>13,739</text:p>
          </table:table-cell>
          <table:table-cell/>
          <table:table-cell table:style-name="ce206" office:value-type="float" office:value="4" calcext:value-type="float">
            <text:p>4</text:p>
          </table:table-cell>
          <table:table-cell table:style-name="ce218" table:formula="of:=+[.C46]*[$Resumen.$C$6]" office:value-type="float" office:value="11458.464184712" calcext:value-type="float">
            <text:p>11458</text:p>
          </table:table-cell>
          <table:table-cell table:style-name="ce218" table:formula="of:=+[.D46]*[$Resumen.$C$6]" office:value-type="float" office:value="11567.6782260751" calcext:value-type="float">
            <text:p>11568</text:p>
          </table:table-cell>
          <table:table-cell table:style-name="ce218" table:formula="of:=+[.E46]*[$Resumen.$C$6]" office:value-type="float" office:value="11731.4992881197" calcext:value-type="float">
            <text:p>11731</text:p>
          </table:table-cell>
          <table:table-cell table:style-name="ce218" table:formula="of:=+[.F46]*[$Resumen.$C$6]" office:value-type="float" office:value="11736.004367326" calcext:value-type="float">
            <text:p>11736</text:p>
          </table:table-cell>
          <table:table-cell table:style-name="ce218" table:formula="of:=+[.G46]*[$Resumen.$C$6]" office:value-type="float" office:value="11573.0843211226" calcext:value-type="float">
            <text:p>11573</text:p>
          </table:table-cell>
          <table:table-cell table:style-name="ce218" table:formula="of:=+[.H46]*[$Resumen.$C$6]" office:value-type="float" office:value="11381.5092408166" calcext:value-type="float">
            <text:p>11382</text:p>
          </table:table-cell>
          <table:table-cell table:style-name="ce218" table:formula="of:=+[.I46]*[$Resumen.$C$6]" office:value-type="float" office:value="20750.6678589871" calcext:value-type="float">
            <text:p>20751</text:p>
          </table:table-cell>
          <table:table-cell table:style-name="ce218" table:formula="of:=+[.J46]*[$Resumen.$C$6]" office:value-type="float" office:value="12295.5898117601" calcext:value-type="float">
            <text:p>12296</text:p>
          </table:table-cell>
          <table:table-cell table:style-name="ce218" table:formula="of:=+[.K46]*[$Resumen.$C$6]" office:value-type="float" office:value="12459.4108738047" calcext:value-type="float">
            <text:p>12459</text:p>
          </table:table-cell>
          <table:table-cell table:style-name="ce218" table:formula="of:=+[.L46]*[$Resumen.$C$6]" office:value-type="float" office:value="12486.7143841455" calcext:value-type="float">
            <text:p>12487</text:p>
          </table:table-cell>
          <table:table-cell table:style-name="ce218" table:formula="of:=+[.M46]*[$Resumen.$C$6]" office:value-type="float" office:value="13636.6153739023" calcext:value-type="float">
            <text:p>13637</text:p>
          </table:table-cell>
          <table:table-cell table:style-name="ce218" table:formula="of:=+[.N46]*[$Resumen.$C$6]" office:value-type="float" office:value="21842.808272618" calcext:value-type="float">
            <text:p>21843</text:p>
          </table:table-cell>
          <table:table-cell table:style-name="ce225" table:formula="of:=SUM([.R46:.AC46])" office:value-type="float" office:value="162920.04620339" calcext:value-type="float">
            <text:p>162920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5" calcext:value-type="float">
            <text:p>5</text:p>
          </table:table-cell>
          <table:table-cell table:style-name="ce217" table:formula="of:=+[.$O$47]*[.C4]" office:value-type="float" office:value="1033.91411927602" calcext:value-type="float">
            <text:p>1,034</text:p>
          </table:table-cell>
          <table:table-cell table:style-name="ce217" table:formula="of:=+[.$O$47]*[.D4]" office:value-type="float" office:value="1043.76866326797" calcext:value-type="float">
            <text:p>1,044</text:p>
          </table:table-cell>
          <table:table-cell table:style-name="ce217" table:formula="of:=+[.$O$47]*[.E4]" office:value-type="float" office:value="1058.55047925591" calcext:value-type="float">
            <text:p>1,059</text:p>
          </table:table-cell>
          <table:table-cell table:style-name="ce217" table:formula="of:=+[.$O$47]*[.F4]" office:value-type="float" office:value="1058.95697919558" calcext:value-type="float">
            <text:p>1,059</text:p>
          </table:table-cell>
          <table:table-cell table:style-name="ce217" table:formula="of:=+[.$O$47]*[.G4]" office:value-type="float" office:value="1044.25646319558" calcext:value-type="float">
            <text:p>1,044</text:p>
          </table:table-cell>
          <table:table-cell table:style-name="ce217" table:formula="of:=+[.$O$47]*[.H4]" office:value-type="float" office:value="1026.97036121569" calcext:value-type="float">
            <text:p>1,027</text:p>
          </table:table-cell>
          <table:table-cell table:style-name="ce217" table:formula="of:=+[.$O$47]*[.I4]" office:value-type="float" office:value="1872.36335847159" calcext:value-type="float">
            <text:p>1,872</text:p>
          </table:table-cell>
          <table:table-cell table:style-name="ce217" table:formula="of:=+[.$O$47]*[.J4]" office:value-type="float" office:value="1109.44919897436" calcext:value-type="float">
            <text:p>1,109</text:p>
          </table:table-cell>
          <table:table-cell table:style-name="ce217" table:formula="of:=+[.$O$47]*[.K4]" office:value-type="float" office:value="1124.23101496229" calcext:value-type="float">
            <text:p>1,124</text:p>
          </table:table-cell>
          <table:table-cell table:style-name="ce217" table:formula="of:=+[.$O$47]*[.L4]" office:value-type="float" office:value="1126.69465096028" calcext:value-type="float">
            <text:p>1,127</text:p>
          </table:table-cell>
          <table:table-cell table:style-name="ce217" table:formula="of:=+[.$O$47]*[.M4]" office:value-type="float" office:value="1230.45191283358" calcext:value-type="float">
            <text:p>1,230</text:p>
          </table:table-cell>
          <table:table-cell table:style-name="ce217" table:formula="of:=+[.$O$47]*[.N4]" office:value-type="float" office:value="1970.90879839115" calcext:value-type="float">
            <text:p>1,971</text:p>
          </table:table-cell>
          <table:table-cell table:style-name="ce228" table:formula="of:=+[.O46]*(1+[.$D$6])" office:value-type="float" office:value="14700.516" calcext:value-type="float">
            <text:p>14,701</text:p>
          </table:table-cell>
          <table:table-cell/>
          <table:table-cell table:style-name="ce206" office:value-type="float" office:value="5" calcext:value-type="float">
            <text:p>5</text:p>
          </table:table-cell>
          <table:table-cell table:style-name="ce218" table:formula="of:=+[.C47]*[$Resumen.$C$6]" office:value-type="float" office:value="12260.5566776419" calcext:value-type="float">
            <text:p>12261</text:p>
          </table:table-cell>
          <table:table-cell table:style-name="ce218" table:formula="of:=+[.D47]*[$Resumen.$C$6]" office:value-type="float" office:value="12377.4157019004" calcext:value-type="float">
            <text:p>12377</text:p>
          </table:table-cell>
          <table:table-cell table:style-name="ce218" table:formula="of:=+[.E47]*[$Resumen.$C$6]" office:value-type="float" office:value="12552.7042382881" calcext:value-type="float">
            <text:p>12553</text:p>
          </table:table-cell>
          <table:table-cell table:style-name="ce218" table:formula="of:=+[.F47]*[$Resumen.$C$6]" office:value-type="float" office:value="12557.5246730388" calcext:value-type="float">
            <text:p>12558</text:p>
          </table:table-cell>
          <table:table-cell table:style-name="ce218" table:formula="of:=+[.G47]*[$Resumen.$C$6]" office:value-type="float" office:value="12383.2002236012" calcext:value-type="float">
            <text:p>12383</text:p>
          </table:table-cell>
          <table:table-cell table:style-name="ce218" table:formula="of:=+[.H47]*[$Resumen.$C$6]" office:value-type="float" office:value="12178.2148876737" calcext:value-type="float">
            <text:p>12178</text:p>
          </table:table-cell>
          <table:table-cell table:style-name="ce218" table:formula="of:=+[.I47]*[$Resumen.$C$6]" office:value-type="float" office:value="22203.2146091162" calcext:value-type="float">
            <text:p>22203</text:p>
          </table:table-cell>
          <table:table-cell table:style-name="ce218" table:formula="of:=+[.J47]*[$Resumen.$C$6]" office:value-type="float" office:value="13156.2810985833" calcext:value-type="float">
            <text:p>13156</text:p>
          </table:table-cell>
          <table:table-cell table:style-name="ce218" table:formula="of:=+[.K47]*[$Resumen.$C$6]" office:value-type="float" office:value="13331.5696349711" calcext:value-type="float">
            <text:p>13332</text:p>
          </table:table-cell>
          <table:table-cell table:style-name="ce218" table:formula="of:=+[.L47]*[$Resumen.$C$6]" office:value-type="float" office:value="13360.7843910357" calcext:value-type="float">
            <text:p>13361</text:p>
          </table:table-cell>
          <table:table-cell table:style-name="ce218" table:formula="of:=+[.M47]*[$Resumen.$C$6]" office:value-type="float" office:value="14591.1784500755" calcext:value-type="float">
            <text:p>14591</text:p>
          </table:table-cell>
          <table:table-cell table:style-name="ce218" table:formula="of:=+[.N47]*[$Resumen.$C$6]" office:value-type="float" office:value="23371.8048517013" calcext:value-type="float">
            <text:p>23372</text:p>
          </table:table-cell>
          <table:table-cell table:style-name="ce225" table:formula="of:=SUM([.R47:.AC47])" office:value-type="float" office:value="174324.449437627" calcext:value-type="float">
            <text:p>174324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6" calcext:value-type="float">
            <text:p>6</text:p>
          </table:table-cell>
          <table:table-cell table:style-name="ce217" table:formula="of:=+[.$O$48]*[.C4]" office:value-type="float" office:value="1106.28810762534" calcext:value-type="float">
            <text:p>1,106</text:p>
          </table:table-cell>
          <table:table-cell table:style-name="ce217" table:formula="of:=+[.$O$48]*[.D4]" office:value-type="float" office:value="1116.83246969673" calcext:value-type="float">
            <text:p>1,117</text:p>
          </table:table-cell>
          <table:table-cell table:style-name="ce217" table:formula="of:=+[.$O$48]*[.E4]" office:value-type="float" office:value="1132.64901280382" calcext:value-type="float">
            <text:p>1,133</text:p>
          </table:table-cell>
          <table:table-cell table:style-name="ce217" table:formula="of:=+[.$O$48]*[.F4]" office:value-type="float" office:value="1133.08396773927" calcext:value-type="float">
            <text:p>1,133</text:p>
          </table:table-cell>
          <table:table-cell table:style-name="ce217" table:formula="of:=+[.$O$48]*[.G4]" office:value-type="float" office:value="1117.35441561927" calcext:value-type="float">
            <text:p>1,117</text:p>
          </table:table-cell>
          <table:table-cell table:style-name="ce217" table:formula="of:=+[.$O$48]*[.H4]" office:value-type="float" office:value="1098.85828650078" calcext:value-type="float">
            <text:p>1,099</text:p>
          </table:table-cell>
          <table:table-cell table:style-name="ce217" table:formula="of:=+[.$O$48]*[.I4]" office:value-type="float" office:value="2003.42879356461" calcext:value-type="float">
            <text:p>2,003</text:p>
          </table:table-cell>
          <table:table-cell table:style-name="ce217" table:formula="of:=+[.$O$48]*[.J4]" office:value-type="float" office:value="1187.11064290257" calcext:value-type="float">
            <text:p>1,187</text:p>
          </table:table-cell>
          <table:table-cell table:style-name="ce217" table:formula="of:=+[.$O$48]*[.K4]" office:value-type="float" office:value="1202.92718600965" calcext:value-type="float">
            <text:p>1,203</text:p>
          </table:table-cell>
          <table:table-cell table:style-name="ce217" table:formula="of:=+[.$O$48]*[.L4]" office:value-type="float" office:value="1205.5632765275" calcext:value-type="float">
            <text:p>1,206</text:p>
          </table:table-cell>
          <table:table-cell table:style-name="ce217" table:formula="of:=+[.$O$48]*[.M4]" office:value-type="float" office:value="1316.58354673193" calcext:value-type="float">
            <text:p>1,317</text:p>
          </table:table-cell>
          <table:table-cell table:style-name="ce217" table:formula="of:=+[.$O$48]*[.N4]" office:value-type="float" office:value="2108.87241427853" calcext:value-type="float">
            <text:p>2,109</text:p>
          </table:table-cell>
          <table:table-cell table:style-name="ce228" table:formula="of:=+[.O47]*(1+[.$D$6])" office:value-type="float" office:value="15729.55212" calcext:value-type="float">
            <text:p>15,730</text:p>
          </table:table-cell>
          <table:table-cell/>
          <table:table-cell table:style-name="ce206" office:value-type="float" office:value="6" calcext:value-type="float">
            <text:p>6</text:p>
          </table:table-cell>
          <table:table-cell table:style-name="ce218" table:formula="of:=+[.C48]*[$Resumen.$C$6]" office:value-type="float" office:value="13118.7956450768" calcext:value-type="float">
            <text:p>13119</text:p>
          </table:table-cell>
          <table:table-cell table:style-name="ce218" table:formula="of:=+[.D48]*[$Resumen.$C$6]" office:value-type="float" office:value="13243.8348010334" calcext:value-type="float">
            <text:p>13244</text:p>
          </table:table-cell>
          <table:table-cell table:style-name="ce218" table:formula="of:=+[.E48]*[$Resumen.$C$6]" office:value-type="float" office:value="13431.3935349683" calcext:value-type="float">
            <text:p>13431</text:p>
          </table:table-cell>
          <table:table-cell table:style-name="ce218" table:formula="of:=+[.F48]*[$Resumen.$C$6]" office:value-type="float" office:value="13436.5514001515" calcext:value-type="float">
            <text:p>13437</text:p>
          </table:table-cell>
          <table:table-cell table:style-name="ce218" table:formula="of:=+[.G48]*[$Resumen.$C$6]" office:value-type="float" office:value="13250.0242392532" calcext:value-type="float">
            <text:p>13250</text:p>
          </table:table-cell>
          <table:table-cell table:style-name="ce218" table:formula="of:=+[.H48]*[$Resumen.$C$6]" office:value-type="float" office:value="13030.6899298109" calcext:value-type="float">
            <text:p>13031</text:p>
          </table:table-cell>
          <table:table-cell table:style-name="ce218" table:formula="of:=+[.I48]*[$Resumen.$C$6]" office:value-type="float" office:value="23757.4396317544" calcext:value-type="float">
            <text:p>23757</text:p>
          </table:table-cell>
          <table:table-cell table:style-name="ce218" table:formula="of:=+[.J48]*[$Resumen.$C$6]" office:value-type="float" office:value="14077.2207754842" calcext:value-type="float">
            <text:p>14077</text:p>
          </table:table-cell>
          <table:table-cell table:style-name="ce218" table:formula="of:=+[.K48]*[$Resumen.$C$6]" office:value-type="float" office:value="14264.7795094191" calcext:value-type="float">
            <text:p>14265</text:p>
          </table:table-cell>
          <table:table-cell table:style-name="ce218" table:formula="of:=+[.L48]*[$Resumen.$C$6]" office:value-type="float" office:value="14296.0392984082" calcext:value-type="float">
            <text:p>14296</text:p>
          </table:table-cell>
          <table:table-cell table:style-name="ce218" table:formula="of:=+[.M48]*[$Resumen.$C$6]" office:value-type="float" office:value="15612.5609415808" calcext:value-type="float">
            <text:p>15613</text:p>
          </table:table-cell>
          <table:table-cell table:style-name="ce218" table:formula="of:=+[.N48]*[$Resumen.$C$6]" office:value-type="float" office:value="25007.8311913204" calcext:value-type="float">
            <text:p>25008</text:p>
          </table:table-cell>
          <table:table-cell table:style-name="ce225" table:formula="of:=SUM([.R48:.AC48])" office:value-type="float" office:value="186527.160898261" calcext:value-type="float">
            <text:p>186527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7" calcext:value-type="float">
            <text:p>7</text:p>
          </table:table-cell>
          <table:table-cell table:style-name="ce217" table:formula="of:=+[.$O$49]*[.C4]" office:value-type="float" office:value="1183.72827515911" calcext:value-type="float">
            <text:p>1,184</text:p>
          </table:table-cell>
          <table:table-cell table:style-name="ce217" table:formula="of:=+[.$O$49]*[.D4]" office:value-type="float" office:value="1195.0107425755" calcext:value-type="float">
            <text:p>1,195</text:p>
          </table:table-cell>
          <table:table-cell table:style-name="ce217" table:formula="of:=+[.$O$49]*[.E4]" office:value-type="float" office:value="1211.93444370009" calcext:value-type="float">
            <text:p>1,212</text:p>
          </table:table-cell>
          <table:table-cell table:style-name="ce217" table:formula="of:=+[.$O$49]*[.F4]" office:value-type="float" office:value="1212.39984548101" calcext:value-type="float">
            <text:p>1,212</text:p>
          </table:table-cell>
          <table:table-cell table:style-name="ce217" table:formula="of:=+[.$O$49]*[.G4]" office:value-type="float" office:value="1195.56922471261" calcext:value-type="float">
            <text:p>1,196</text:p>
          </table:table-cell>
          <table:table-cell table:style-name="ce217" table:formula="of:=+[.$O$49]*[.H4]" office:value-type="float" office:value="1175.77836655584" calcext:value-type="float">
            <text:p>1,176</text:p>
          </table:table-cell>
          <table:table-cell table:style-name="ce217" table:formula="of:=+[.$O$49]*[.I4]" office:value-type="float" office:value="2143.66880911413" calcext:value-type="float">
            <text:p>2,144</text:p>
          </table:table-cell>
          <table:table-cell table:style-name="ce217" table:formula="of:=+[.$O$49]*[.J4]" office:value-type="float" office:value="1270.20838790574" calcext:value-type="float">
            <text:p>1,270</text:p>
          </table:table-cell>
          <table:table-cell table:style-name="ce217" table:formula="of:=+[.$O$49]*[.K4]" office:value-type="float" office:value="1287.13208903033" calcext:value-type="float">
            <text:p>1,287</text:p>
          </table:table-cell>
          <table:table-cell table:style-name="ce217" table:formula="of:=+[.$O$49]*[.L4]" office:value-type="float" office:value="1289.95270588443" calcext:value-type="float">
            <text:p>1,290</text:p>
          </table:table-cell>
          <table:table-cell table:style-name="ce217" table:formula="of:=+[.$O$49]*[.M4]" office:value-type="float" office:value="1408.74439500317" calcext:value-type="float">
            <text:p>1,409</text:p>
          </table:table-cell>
          <table:table-cell table:style-name="ce217" table:formula="of:=+[.$O$49]*[.N4]" office:value-type="float" office:value="2256.49348327803" calcext:value-type="float">
            <text:p>2,256</text:p>
          </table:table-cell>
          <table:table-cell table:style-name="ce228" table:formula="of:=+[.O48]*(1+[.$D$6])" office:value-type="float" office:value="16830.6207684" calcext:value-type="float">
            <text:p>16,831</text:p>
          </table:table-cell>
          <table:table-cell/>
          <table:table-cell table:style-name="ce206" office:value-type="float" office:value="7" calcext:value-type="float">
            <text:p>7</text:p>
          </table:table-cell>
          <table:table-cell table:style-name="ce218" table:formula="of:=+[.C49]*[$Resumen.$C$6]" office:value-type="float" office:value="14037.1113402322" calcext:value-type="float">
            <text:p>14037</text:p>
          </table:table-cell>
          <table:table-cell table:style-name="ce218" table:formula="of:=+[.D49]*[$Resumen.$C$6]" office:value-type="float" office:value="14170.9032371057" calcext:value-type="float">
            <text:p>14171</text:p>
          </table:table-cell>
          <table:table-cell table:style-name="ce218" table:formula="of:=+[.E49]*[$Resumen.$C$6]" office:value-type="float" office:value="14371.5910824161" calcext:value-type="float">
            <text:p>14372</text:p>
          </table:table-cell>
          <table:table-cell table:style-name="ce218" table:formula="of:=+[.F49]*[$Resumen.$C$6]" office:value-type="float" office:value="14377.1099981621" calcext:value-type="float">
            <text:p>14377</text:p>
          </table:table-cell>
          <table:table-cell table:style-name="ce218" table:formula="of:=+[.G49]*[$Resumen.$C$6]" office:value-type="float" office:value="14177.525936001" calcext:value-type="float">
            <text:p>14178</text:p>
          </table:table-cell>
          <table:table-cell table:style-name="ce218" table:formula="of:=+[.H49]*[$Resumen.$C$6]" office:value-type="float" office:value="13942.8382248976" calcext:value-type="float">
            <text:p>13943</text:p>
          </table:table-cell>
          <table:table-cell table:style-name="ce218" table:formula="of:=+[.I49]*[$Resumen.$C$6]" office:value-type="float" office:value="25420.4604059772" calcext:value-type="float">
            <text:p>25420</text:p>
          </table:table-cell>
          <table:table-cell table:style-name="ce218" table:formula="of:=+[.J49]*[$Resumen.$C$6]" office:value-type="float" office:value="15062.626229768" calcext:value-type="float">
            <text:p>15063</text:p>
          </table:table-cell>
          <table:table-cell table:style-name="ce218" table:formula="of:=+[.K49]*[$Resumen.$C$6]" office:value-type="float" office:value="15263.3140750784" calcext:value-type="float">
            <text:p>15263</text:p>
          </table:table-cell>
          <table:table-cell table:style-name="ce218" table:formula="of:=+[.L49]*[$Resumen.$C$6]" office:value-type="float" office:value="15296.7620492968" calcext:value-type="float">
            <text:p>15297</text:p>
          </table:table-cell>
          <table:table-cell table:style-name="ce218" table:formula="of:=+[.M49]*[$Resumen.$C$6]" office:value-type="float" office:value="16705.4402074914" calcext:value-type="float">
            <text:p>16705</text:p>
          </table:table-cell>
          <table:table-cell table:style-name="ce218" table:formula="of:=+[.N49]*[$Resumen.$C$6]" office:value-type="float" office:value="26758.3793747128" calcext:value-type="float">
            <text:p>26758</text:p>
          </table:table-cell>
          <table:table-cell table:style-name="ce225" table:formula="of:=SUM([.R49:.AC49])" office:value-type="float" office:value="199584.062161139" calcext:value-type="float">
            <text:p>199584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8" calcext:value-type="float">
            <text:p>8</text:p>
          </table:table-cell>
          <table:table-cell table:style-name="ce217" table:formula="of:=+[.$O$50]*[.C4]" office:value-type="float" office:value="1266.58925442025" calcext:value-type="float">
            <text:p>1,267</text:p>
          </table:table-cell>
          <table:table-cell table:style-name="ce217" table:formula="of:=+[.$O$50]*[.D4]" office:value-type="float" office:value="1278.66149455579" calcext:value-type="float">
            <text:p>1,279</text:p>
          </table:table-cell>
          <table:table-cell table:style-name="ce217" table:formula="of:=+[.$O$50]*[.E4]" office:value-type="float" office:value="1296.7698547591" calcext:value-type="float">
            <text:p>1,297</text:p>
          </table:table-cell>
          <table:table-cell table:style-name="ce217" table:formula="of:=+[.$O$50]*[.F4]" office:value-type="float" office:value="1297.26783466469" calcext:value-type="float">
            <text:p>1,297</text:p>
          </table:table-cell>
          <table:table-cell table:style-name="ce217" table:formula="of:=+[.$O$50]*[.G4]" office:value-type="float" office:value="1279.2590704425" calcext:value-type="float">
            <text:p>1,279</text:p>
          </table:table-cell>
          <table:table-cell table:style-name="ce217" table:formula="of:=+[.$O$50]*[.H4]" office:value-type="float" office:value="1258.08285221475" calcext:value-type="float">
            <text:p>1,258</text:p>
          </table:table-cell>
          <table:table-cell table:style-name="ce217" table:formula="of:=+[.$O$50]*[.I4]" office:value-type="float" office:value="2293.72562575212" calcext:value-type="float">
            <text:p>2,294</text:p>
          </table:table-cell>
          <table:table-cell table:style-name="ce217" table:formula="of:=+[.$O$50]*[.J4]" office:value-type="float" office:value="1359.12297505915" calcext:value-type="float">
            <text:p>1,359</text:p>
          </table:table-cell>
          <table:table-cell table:style-name="ce217" table:formula="of:=+[.$O$50]*[.K4]" office:value-type="float" office:value="1377.23133526245" calcext:value-type="float">
            <text:p>1,377</text:p>
          </table:table-cell>
          <table:table-cell table:style-name="ce217" table:formula="of:=+[.$O$50]*[.L4]" office:value-type="float" office:value="1380.24939529634" calcext:value-type="float">
            <text:p>1,380</text:p>
          </table:table-cell>
          <table:table-cell table:style-name="ce217" table:formula="of:=+[.$O$50]*[.M4]" office:value-type="float" office:value="1507.35650265339" calcext:value-type="float">
            <text:p>1,507</text:p>
          </table:table-cell>
          <table:table-cell table:style-name="ce217" table:formula="of:=+[.$O$50]*[.N4]" office:value-type="float" office:value="2414.44802710749" calcext:value-type="float">
            <text:p>2,414</text:p>
          </table:table-cell>
          <table:table-cell table:style-name="ce228" table:formula="of:=+[.O49]*(1+[.$D$6])" office:value-type="float" office:value="18008.764222188" calcext:value-type="float">
            <text:p>18,009</text:p>
          </table:table-cell>
          <table:table-cell/>
          <table:table-cell table:style-name="ce206" office:value-type="float" office:value="8" calcext:value-type="float">
            <text:p>8</text:p>
          </table:table-cell>
          <table:table-cell table:style-name="ce218" table:formula="of:=+[.C50]*[$Resumen.$C$6]" office:value-type="float" office:value="15019.7091340484" calcext:value-type="float">
            <text:p>15020</text:p>
          </table:table-cell>
          <table:table-cell table:style-name="ce218" table:formula="of:=+[.D50]*[$Resumen.$C$6]" office:value-type="float" office:value="15162.8664637031" calcext:value-type="float">
            <text:p>15163</text:p>
          </table:table-cell>
          <table:table-cell table:style-name="ce218" table:formula="of:=+[.E50]*[$Resumen.$C$6]" office:value-type="float" office:value="15377.6024581852" calcext:value-type="float">
            <text:p>15378</text:p>
          </table:table-cell>
          <table:table-cell table:style-name="ce218" table:formula="of:=+[.F50]*[$Resumen.$C$6]" office:value-type="float" office:value="15383.5076980335" calcext:value-type="float">
            <text:p>15384</text:p>
          </table:table-cell>
          <table:table-cell table:style-name="ce218" table:formula="of:=+[.G50]*[$Resumen.$C$6]" office:value-type="float" office:value="15169.952751521" calcext:value-type="float">
            <text:p>15170</text:p>
          </table:table-cell>
          <table:table-cell table:style-name="ce218" table:formula="of:=+[.H50]*[$Resumen.$C$6]" office:value-type="float" office:value="14918.8369006405" calcext:value-type="float">
            <text:p>14919</text:p>
          </table:table-cell>
          <table:table-cell table:style-name="ce218" table:formula="of:=+[.I50]*[$Resumen.$C$6]" office:value-type="float" office:value="27199.8926343956" calcext:value-type="float">
            <text:p>27200</text:p>
          </table:table-cell>
          <table:table-cell table:style-name="ce218" table:formula="of:=+[.J50]*[$Resumen.$C$6]" office:value-type="float" office:value="16117.0100658518" calcext:value-type="float">
            <text:p>16117</text:p>
          </table:table-cell>
          <table:table-cell table:style-name="ce218" table:formula="of:=+[.K50]*[$Resumen.$C$6]" office:value-type="float" office:value="16331.7460603339" calcext:value-type="float">
            <text:p>16332</text:p>
          </table:table-cell>
          <table:table-cell table:style-name="ce218" table:formula="of:=+[.L50]*[$Resumen.$C$6]" office:value-type="float" office:value="16367.5353927475" calcext:value-type="float">
            <text:p>16368</text:p>
          </table:table-cell>
          <table:table-cell table:style-name="ce218" table:formula="of:=+[.M50]*[$Resumen.$C$6]" office:value-type="float" office:value="17874.8210220158" calcext:value-type="float">
            <text:p>17875</text:p>
          </table:table-cell>
          <table:table-cell table:style-name="ce218" table:formula="of:=+[.N50]*[$Resumen.$C$6]" office:value-type="float" office:value="28631.4659309427" calcext:value-type="float">
            <text:p>28631</text:p>
          </table:table-cell>
          <table:table-cell table:style-name="ce225" table:formula="of:=SUM([.R50:.AC50])" office:value-type="float" office:value="213554.946512419" calcext:value-type="float">
            <text:p>213555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9" calcext:value-type="float">
            <text:p>9</text:p>
          </table:table-cell>
          <table:table-cell table:style-name="ce217" table:formula="of:=+[.$O$51]*[.C4]" office:value-type="float" office:value="1355.25050222967" calcext:value-type="float">
            <text:p>1,355</text:p>
          </table:table-cell>
          <table:table-cell table:style-name="ce217" table:formula="of:=+[.$O$51]*[.D4]" office:value-type="float" office:value="1368.16779917469" calcext:value-type="float">
            <text:p>1,368</text:p>
          </table:table-cell>
          <table:table-cell table:style-name="ce217" table:formula="of:=+[.$O$51]*[.E4]" office:value-type="float" office:value="1387.54374459223" calcext:value-type="float">
            <text:p>1,388</text:p>
          </table:table-cell>
          <table:table-cell table:style-name="ce217" table:formula="of:=+[.$O$51]*[.F4]" office:value-type="float" office:value="1388.07658309121" calcext:value-type="float">
            <text:p>1,388</text:p>
          </table:table-cell>
          <table:table-cell table:style-name="ce217" table:formula="of:=+[.$O$51]*[.G4]" office:value-type="float" office:value="1368.80720537347" calcext:value-type="float">
            <text:p>1,369</text:p>
          </table:table-cell>
          <table:table-cell table:style-name="ce217" table:formula="of:=+[.$O$51]*[.H4]" office:value-type="float" office:value="1346.14865186978" calcext:value-type="float">
            <text:p>1,346</text:p>
          </table:table-cell>
          <table:table-cell table:style-name="ce217" table:formula="of:=+[.$O$51]*[.I4]" office:value-type="float" office:value="2454.28641955477" calcext:value-type="float">
            <text:p>2,454</text:p>
          </table:table-cell>
          <table:table-cell table:style-name="ce217" table:formula="of:=+[.$O$51]*[.J4]" office:value-type="float" office:value="1454.26158331329" calcext:value-type="float">
            <text:p>1,454</text:p>
          </table:table-cell>
          <table:table-cell table:style-name="ce217" table:formula="of:=+[.$O$51]*[.K4]" office:value-type="float" office:value="1473.63752873082" calcext:value-type="float">
            <text:p>1,474</text:p>
          </table:table-cell>
          <table:table-cell table:style-name="ce217" table:formula="of:=+[.$O$51]*[.L4]" office:value-type="float" office:value="1476.86685296708" calcext:value-type="float">
            <text:p>1,477</text:p>
          </table:table-cell>
          <table:table-cell table:style-name="ce217" table:formula="of:=+[.$O$51]*[.M4]" office:value-type="float" office:value="1612.87145783913" calcext:value-type="float">
            <text:p>1,613</text:p>
          </table:table-cell>
          <table:table-cell table:style-name="ce217" table:formula="of:=+[.$O$51]*[.N4]" office:value-type="float" office:value="2583.45938900502" calcext:value-type="float">
            <text:p>2,583</text:p>
          </table:table-cell>
          <table:table-cell table:style-name="ce228" table:formula="of:=+[.O50]*(1+[.$D$6])" office:value-type="float" office:value="19269.3777177412" calcext:value-type="float">
            <text:p>19,269</text:p>
          </table:table-cell>
          <table:table-cell/>
          <table:table-cell table:style-name="ce206" office:value-type="float" office:value="9" calcext:value-type="float">
            <text:p>9</text:p>
          </table:table-cell>
          <table:table-cell table:style-name="ce218" table:formula="of:=+[.C51]*[$Resumen.$C$6]" office:value-type="float" office:value="16071.0887734318" calcext:value-type="float">
            <text:p>16071</text:p>
          </table:table-cell>
          <table:table-cell table:style-name="ce218" table:formula="of:=+[.D51]*[$Resumen.$C$6]" office:value-type="float" office:value="16224.2671161624" calcext:value-type="float">
            <text:p>16224</text:p>
          </table:table-cell>
          <table:table-cell table:style-name="ce218" table:formula="of:=+[.E51]*[$Resumen.$C$6]" office:value-type="float" office:value="16454.0346302582" calcext:value-type="float">
            <text:p>16454</text:p>
          </table:table-cell>
          <table:table-cell table:style-name="ce218" table:formula="of:=+[.F51]*[$Resumen.$C$6]" office:value-type="float" office:value="16460.3532368958" calcext:value-type="float">
            <text:p>16460</text:p>
          </table:table-cell>
          <table:table-cell table:style-name="ce218" table:formula="of:=+[.G51]*[$Resumen.$C$6]" office:value-type="float" office:value="16231.8494441275" calcext:value-type="float">
            <text:p>16232</text:p>
          </table:table-cell>
          <table:table-cell table:style-name="ce218" table:formula="of:=+[.H51]*[$Resumen.$C$6]" office:value-type="float" office:value="15963.1554836853" calcext:value-type="float">
            <text:p>15963</text:p>
          </table:table-cell>
          <table:table-cell table:style-name="ce218" table:formula="of:=+[.I51]*[$Resumen.$C$6]" office:value-type="float" office:value="29103.8851188033" calcext:value-type="float">
            <text:p>29104</text:p>
          </table:table-cell>
          <table:table-cell table:style-name="ce218" table:formula="of:=+[.J51]*[$Resumen.$C$6]" office:value-type="float" office:value="17245.2007704614" calcext:value-type="float">
            <text:p>17245</text:p>
          </table:table-cell>
          <table:table-cell table:style-name="ce218" table:formula="of:=+[.K51]*[$Resumen.$C$6]" office:value-type="float" office:value="17474.9682845572" calcext:value-type="float">
            <text:p>17475</text:p>
          </table:table-cell>
          <table:table-cell table:style-name="ce218" table:formula="of:=+[.L51]*[$Resumen.$C$6]" office:value-type="float" office:value="17513.2628702399" calcext:value-type="float">
            <text:p>17513</text:p>
          </table:table-cell>
          <table:table-cell table:style-name="ce218" table:formula="of:=+[.M51]*[$Resumen.$C$6]" office:value-type="float" office:value="19126.0584935569" calcext:value-type="float">
            <text:p>19126</text:p>
          </table:table-cell>
          <table:table-cell table:style-name="ce218" table:formula="of:=+[.N51]*[$Resumen.$C$6]" office:value-type="float" office:value="30635.6685461087" calcext:value-type="float">
            <text:p>30636</text:p>
          </table:table-cell>
          <table:table-cell table:style-name="ce225" table:formula="of:=SUM([.R51:.AC51])" office:value-type="float" office:value="228503.792768288" calcext:value-type="float">
            <text:p>228504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10" calcext:value-type="float">
            <text:p>10</text:p>
          </table:table-cell>
          <table:table-cell table:style-name="ce217" table:formula="of:=+[.$O$52]*[.C4]" office:value-type="float" office:value="1450.11803738575" calcext:value-type="float">
            <text:p>1,450</text:p>
          </table:table-cell>
          <table:table-cell table:style-name="ce217" table:formula="of:=+[.$O$52]*[.D4]" office:value-type="float" office:value="1463.93954511692" calcext:value-type="float">
            <text:p>1,464</text:p>
          </table:table-cell>
          <table:table-cell table:style-name="ce217" table:formula="of:=+[.$O$52]*[.E4]" office:value-type="float" office:value="1484.67180671369" calcext:value-type="float">
            <text:p>1,485</text:p>
          </table:table-cell>
          <table:table-cell table:style-name="ce217" table:formula="of:=+[.$O$52]*[.F4]" office:value-type="float" office:value="1485.2419439076" calcext:value-type="float">
            <text:p>1,485</text:p>
          </table:table-cell>
          <table:table-cell table:style-name="ce217" table:formula="of:=+[.$O$52]*[.G4]" office:value-type="float" office:value="1464.62370974962" calcext:value-type="float">
            <text:p>1,465</text:p>
          </table:table-cell>
          <table:table-cell table:style-name="ce217" table:formula="of:=+[.$O$52]*[.H4]" office:value-type="float" office:value="1440.37905750067" calcext:value-type="float">
            <text:p>1,440</text:p>
          </table:table-cell>
          <table:table-cell table:style-name="ce217" table:formula="of:=+[.$O$52]*[.I4]" office:value-type="float" office:value="2626.0864689236" calcext:value-type="float">
            <text:p>2,626</text:p>
          </table:table-cell>
          <table:table-cell table:style-name="ce217" table:formula="of:=+[.$O$52]*[.J4]" office:value-type="float" office:value="1556.05989414522" calcext:value-type="float">
            <text:p>1,556</text:p>
          </table:table-cell>
          <table:table-cell table:style-name="ce217" table:formula="of:=+[.$O$52]*[.K4]" office:value-type="float" office:value="1576.79215574198" calcext:value-type="float">
            <text:p>1,577</text:p>
          </table:table-cell>
          <table:table-cell table:style-name="ce217" table:formula="of:=+[.$O$52]*[.L4]" office:value-type="float" office:value="1580.24753267478" calcext:value-type="float">
            <text:p>1,580</text:p>
          </table:table-cell>
          <table:table-cell table:style-name="ce217" table:formula="of:=+[.$O$52]*[.M4]" office:value-type="float" office:value="1725.77245988787" calcext:value-type="float">
            <text:p>1,726</text:p>
          </table:table-cell>
          <table:table-cell table:style-name="ce217" table:formula="of:=+[.$O$52]*[.N4]" office:value-type="float" office:value="2764.30154623537" calcext:value-type="float">
            <text:p>2,764</text:p>
          </table:table-cell>
          <table:table-cell table:style-name="ce228" table:formula="of:=+[.O51]*(1+[.$D$6])" office:value-type="float" office:value="20618.234157983" calcext:value-type="float">
            <text:p>20,618</text:p>
          </table:table-cell>
          <table:table-cell/>
          <table:table-cell table:style-name="ce206" office:value-type="float" office:value="10" calcext:value-type="float">
            <text:p>10</text:p>
          </table:table-cell>
          <table:table-cell table:style-name="ce218" table:formula="of:=+[.C52]*[$Resumen.$C$6]" office:value-type="float" office:value="17196.064987572" calcext:value-type="float">
            <text:p>17196</text:p>
          </table:table-cell>
          <table:table-cell table:style-name="ce218" table:formula="of:=+[.D52]*[$Resumen.$C$6]" office:value-type="float" office:value="17359.9658142937" calcext:value-type="float">
            <text:p>17360</text:p>
          </table:table-cell>
          <table:table-cell table:style-name="ce218" table:formula="of:=+[.E52]*[$Resumen.$C$6]" office:value-type="float" office:value="17605.8170543762" calcext:value-type="float">
            <text:p>17606</text:p>
          </table:table-cell>
          <table:table-cell table:style-name="ce218" table:formula="of:=+[.F52]*[$Resumen.$C$6]" office:value-type="float" office:value="17612.5779634785" calcext:value-type="float">
            <text:p>17613</text:p>
          </table:table-cell>
          <table:table-cell table:style-name="ce218" table:formula="of:=+[.G52]*[$Resumen.$C$6]" office:value-type="float" office:value="17368.0789052164" calcext:value-type="float">
            <text:p>17368</text:p>
          </table:table-cell>
          <table:table-cell table:style-name="ce218" table:formula="of:=+[.H52]*[$Resumen.$C$6]" office:value-type="float" office:value="17080.5763675433" calcext:value-type="float">
            <text:p>17081</text:p>
          </table:table-cell>
          <table:table-cell table:style-name="ce218" table:formula="of:=+[.I52]*[$Resumen.$C$6]" office:value-type="float" office:value="31141.1570771195" calcext:value-type="float">
            <text:p>31141</text:p>
          </table:table-cell>
          <table:table-cell table:style-name="ce218" table:formula="of:=+[.J52]*[$Resumen.$C$6]" office:value-type="float" office:value="18452.3648243937" calcext:value-type="float">
            <text:p>18452</text:p>
          </table:table-cell>
          <table:table-cell table:style-name="ce218" table:formula="of:=+[.K52]*[$Resumen.$C$6]" office:value-type="float" office:value="18698.2160644762" calcext:value-type="float">
            <text:p>18698</text:p>
          </table:table-cell>
          <table:table-cell table:style-name="ce218" table:formula="of:=+[.L52]*[$Resumen.$C$6]" office:value-type="float" office:value="18739.1912711567" calcext:value-type="float">
            <text:p>18739</text:p>
          </table:table-cell>
          <table:table-cell table:style-name="ce218" table:formula="of:=+[.M52]*[$Resumen.$C$6]" office:value-type="float" office:value="20464.8825881059" calcext:value-type="float">
            <text:p>20465</text:p>
          </table:table-cell>
          <table:table-cell table:style-name="ce218" table:formula="of:=+[.N52]*[$Resumen.$C$6]" office:value-type="float" office:value="32780.1653443363" calcext:value-type="float">
            <text:p>32780</text:p>
          </table:table-cell>
          <table:table-cell table:style-name="ce225" table:formula="of:=SUM([.R52:.AC52])" office:value-type="float" office:value="244499.058262069" calcext:value-type="float">
            <text:p>244499</text:p>
          </table:table-cell>
          <table:table-cell table:number-columns-repeated="16354"/>
        </table:table-row>
        <table:table-row table:style-name="ro8" table:number-rows-repeated="2">
          <table:table-cell table:number-columns-repeated="16384"/>
        </table:table-row>
        <table:table-row table:style-name="ro8">
          <table:table-cell/>
          <table:table-cell table:style-name="ce210" office:value-type="string" calcext:value-type="string" table:number-columns-spanned="14" table:number-rows-spanned="1">
            <text:p>CONSOLIDAD DE VENTAS MENSUALES EN GALONES DE COMBUSTIBLES</text:p>
          </table:table-cell>
          <table:covered-table-cell table:number-columns-repeated="13" table:style-name="ce210"/>
          <table:table-cell/>
          <table:table-cell table:style-name="ce210" office:value-type="string" calcext:value-type="string" table:number-columns-spanned="14" table:number-rows-spanned="1">
            <text:p>CONSOLIDAD DE VENTAS MENSUALES EN SOLES DE COMBUSTIBLES</text:p>
          </table:table-cell>
          <table:covered-table-cell table:number-columns-repeated="13" table:style-name="ce210"/>
          <table:table-cell table:number-columns-repeated="16354"/>
        </table:table-row>
        <table:table-row table:style-name="ro8">
          <table:table-cell/>
          <table:table-cell table:style-name="ce213" table:number-columns-repeated="14"/>
          <table:table-cell/>
          <table:table-cell table:style-name="ce213" table:number-columns-repeated="14"/>
          <table:table-cell table:number-columns-repeated="16354"/>
        </table:table-row>
        <table:table-row table:style-name="ro8">
          <table:table-cell/>
          <table:table-cell table:style-name="ce212" office:value-type="string" calcext:value-type="string">
            <text:p>Año</text:p>
          </table:table-cell>
          <table:table-cell table:style-name="ce212" office:value-type="string" calcext:value-type="string">
            <text:p>Mes 1</text:p>
          </table:table-cell>
          <table:table-cell table:style-name="ce212" office:value-type="string" calcext:value-type="string">
            <text:p>Mes 2</text:p>
          </table:table-cell>
          <table:table-cell table:style-name="ce212" office:value-type="string" calcext:value-type="string">
            <text:p>Mes 3</text:p>
          </table:table-cell>
          <table:table-cell table:style-name="ce212" office:value-type="string" calcext:value-type="string">
            <text:p>Mes 4</text:p>
          </table:table-cell>
          <table:table-cell table:style-name="ce212" office:value-type="string" calcext:value-type="string">
            <text:p>Mes 5</text:p>
          </table:table-cell>
          <table:table-cell table:style-name="ce212" office:value-type="string" calcext:value-type="string">
            <text:p>Mes 6</text:p>
          </table:table-cell>
          <table:table-cell table:style-name="ce212" office:value-type="string" calcext:value-type="string">
            <text:p>Mes 7</text:p>
          </table:table-cell>
          <table:table-cell table:style-name="ce212" office:value-type="string" calcext:value-type="string">
            <text:p>Mes 8</text:p>
          </table:table-cell>
          <table:table-cell table:style-name="ce212" office:value-type="string" calcext:value-type="string">
            <text:p>Mes 9</text:p>
          </table:table-cell>
          <table:table-cell table:style-name="ce212" office:value-type="string" calcext:value-type="string">
            <text:p>Mes 10</text:p>
          </table:table-cell>
          <table:table-cell table:style-name="ce212" office:value-type="string" calcext:value-type="string">
            <text:p>Mes 11</text:p>
          </table:table-cell>
          <table:table-cell table:style-name="ce212" office:value-type="string" calcext:value-type="string">
            <text:p>Mes 12</text:p>
          </table:table-cell>
          <table:table-cell table:style-name="ce212" office:value-type="string" calcext:value-type="string">
            <text:p>TOTAL</text:p>
          </table:table-cell>
          <table:table-cell/>
          <table:table-cell table:style-name="ce212" office:value-type="string" calcext:value-type="string">
            <text:p>Año</text:p>
          </table:table-cell>
          <table:table-cell table:style-name="ce212" office:value-type="string" calcext:value-type="string">
            <text:p>Mes 1</text:p>
          </table:table-cell>
          <table:table-cell table:style-name="ce212" office:value-type="string" calcext:value-type="string">
            <text:p>Mes 2</text:p>
          </table:table-cell>
          <table:table-cell table:style-name="ce212" office:value-type="string" calcext:value-type="string">
            <text:p>Mes 3</text:p>
          </table:table-cell>
          <table:table-cell table:style-name="ce212" office:value-type="string" calcext:value-type="string">
            <text:p>Mes 4</text:p>
          </table:table-cell>
          <table:table-cell table:style-name="ce212" office:value-type="string" calcext:value-type="string">
            <text:p>Mes 5</text:p>
          </table:table-cell>
          <table:table-cell table:style-name="ce212" office:value-type="string" calcext:value-type="string">
            <text:p>Mes 6</text:p>
          </table:table-cell>
          <table:table-cell table:style-name="ce212" office:value-type="string" calcext:value-type="string">
            <text:p>Mes 7</text:p>
          </table:table-cell>
          <table:table-cell table:style-name="ce212" office:value-type="string" calcext:value-type="string">
            <text:p>Mes 8</text:p>
          </table:table-cell>
          <table:table-cell table:style-name="ce212" office:value-type="string" calcext:value-type="string">
            <text:p>Mes 9</text:p>
          </table:table-cell>
          <table:table-cell table:style-name="ce212" office:value-type="string" calcext:value-type="string">
            <text:p>Mes 10</text:p>
          </table:table-cell>
          <table:table-cell table:style-name="ce212" office:value-type="string" calcext:value-type="string">
            <text:p>Mes 11</text:p>
          </table:table-cell>
          <table:table-cell table:style-name="ce212" office:value-type="string" calcext:value-type="string">
            <text:p>Mes 12</text:p>
          </table:table-cell>
          <table:table-cell table:style-name="ce212" office:value-type="string" calcext:value-type="string">
            <text:p>TOTAL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1" calcext:value-type="float">
            <text:p>1</text:p>
          </table:table-cell>
          <table:table-cell table:style-name="ce218" table:formula="of:=+[.C13]+[.C28]+[.C43]" office:value-type="float" office:value="8158.49170437406" calcext:value-type="float">
            <text:p>8158</text:p>
          </table:table-cell>
          <table:table-cell table:style-name="ce218" table:formula="of:=+[.D13]+[.D28]+[.D43]" office:value-type="float" office:value="8236.25272331155" calcext:value-type="float">
            <text:p>8236</text:p>
          </table:table-cell>
          <table:table-cell table:style-name="ce218" table:formula="of:=+[.E13]+[.E28]+[.E43]" office:value-type="float" office:value="8352.89425171778" calcext:value-type="float">
            <text:p>8353</text:p>
          </table:table-cell>
          <table:table-cell table:style-name="ce218" table:formula="of:=+[.F13]+[.F28]+[.F43]" office:value-type="float" office:value="8356.10189374895" calcext:value-type="float">
            <text:p>8356</text:p>
          </table:table-cell>
          <table:table-cell table:style-name="ce218" table:formula="of:=+[.G13]+[.G28]+[.G43]" office:value-type="float" office:value="8240.10189374895" calcext:value-type="float">
            <text:p>8240</text:p>
          </table:table-cell>
          <table:table-cell table:style-name="ce218" table:formula="of:=+[.H13]+[.H28]+[.H43]" office:value-type="float" office:value="8103.69934640523" calcext:value-type="float">
            <text:p>8104</text:p>
          </table:table-cell>
          <table:table-cell table:style-name="ce218" table:formula="of:=+[.I13]+[.I28]+[.I43]" office:value-type="float" office:value="14774.593598123" calcext:value-type="float">
            <text:p>14775</text:p>
          </table:table-cell>
          <table:table-cell table:style-name="ce218" table:formula="of:=+[.J13]+[.J28]+[.J43]" office:value-type="float" office:value="8754.52991452992" calcext:value-type="float">
            <text:p>8755</text:p>
          </table:table-cell>
          <table:table-cell table:style-name="ce218" table:formula="of:=+[.K13]+[.K28]+[.K43]" office:value-type="float" office:value="8871.17144293615" calcext:value-type="float">
            <text:p>8871</text:p>
          </table:table-cell>
          <table:table-cell table:style-name="ce218" table:formula="of:=+[.L13]+[.L28]+[.L43]" office:value-type="float" office:value="8890.61169767052" calcext:value-type="float">
            <text:p>8891</text:p>
          </table:table-cell>
          <table:table-cell table:style-name="ce218" table:formula="of:=+[.M13]+[.M28]+[.M43]" office:value-type="float" office:value="9709.34774593597" calcext:value-type="float">
            <text:p>9709</text:p>
          </table:table-cell>
          <table:table-cell table:style-name="ce218" table:formula="of:=+[.N13]+[.N28]+[.N43]" office:value-type="float" office:value="15552.2037874979" calcext:value-type="float">
            <text:p>15552</text:p>
          </table:table-cell>
          <table:table-cell table:style-name="ce225" table:formula="of:=SUM([.C58:.N58])" office:value-type="float" office:value="116000" calcext:value-type="float">
            <text:p>116000</text:p>
          </table:table-cell>
          <table:table-cell/>
          <table:table-cell table:style-name="ce206" office:value-type="float" office:value="1" calcext:value-type="float">
            <text:p>1</text:p>
          </table:table-cell>
          <table:table-cell table:style-name="ce218" table:formula="of:=+[.R13]+[.R28]+[.R43]" office:value-type="float" office:value="90588.0999271417" calcext:value-type="float">
            <text:p>90588</text:p>
          </table:table-cell>
          <table:table-cell table:style-name="ce218" table:formula="of:=+[.S13]+[.S28]+[.S43]" office:value-type="float" office:value="91451.5221391382" calcext:value-type="float">
            <text:p>91452</text:p>
          </table:table-cell>
          <table:table-cell table:style-name="ce218" table:formula="of:=+[.T13]+[.T28]+[.T43]" office:value-type="float" office:value="92746.6554571329" calcext:value-type="float">
            <text:p>92747</text:p>
          </table:table-cell>
          <table:table-cell table:style-name="ce218" table:formula="of:=+[.U13]+[.U28]+[.U43]" office:value-type="float" office:value="92782.2716233777" calcext:value-type="float">
            <text:p>92782</text:p>
          </table:table-cell>
          <table:table-cell table:style-name="ce218" table:formula="of:=+[.V13]+[.V28]+[.V43]" office:value-type="float" office:value="91494.261538632" calcext:value-type="float">
            <text:p>91494</text:p>
          </table:table-cell>
          <table:table-cell table:style-name="ce218" table:formula="of:=+[.W13]+[.W28]+[.W43]" office:value-type="float" office:value="89979.7110510136" calcext:value-type="float">
            <text:p>89980</text:p>
          </table:table-cell>
          <table:table-cell table:style-name="ce218" table:formula="of:=+[.X13]+[.X28]+[.X43]" office:value-type="float" office:value="164050.220279333" calcext:value-type="float">
            <text:p>164050</text:p>
          </table:table-cell>
          <table:table-cell table:style-name="ce218" table:formula="of:=+[.Y13]+[.Y28]+[.Y43]" office:value-type="float" office:value="97206.2311820948" calcext:value-type="float">
            <text:p>97206</text:p>
          </table:table-cell>
          <table:table-cell table:style-name="ce218" table:formula="of:=+[.Z13]+[.Z28]+[.Z43]" office:value-type="float" office:value="98501.3645000895" calcext:value-type="float">
            <text:p>98501</text:p>
          </table:table-cell>
          <table:table-cell table:style-name="ce218" table:formula="of:=+[.AA13]+[.AA28]+[.AA43]" office:value-type="float" office:value="98717.2200530886" calcext:value-type="float">
            <text:p>98717</text:p>
          </table:table-cell>
          <table:table-cell table:style-name="ce218" table:formula="of:=+[.AB13]+[.AB28]+[.AB43]" office:value-type="float" office:value="107808.084595423" calcext:value-type="float">
            <text:p>107808</text:p>
          </table:table-cell>
          <table:table-cell table:style-name="ce218" table:formula="of:=+[.AC13]+[.AC28]+[.AC43]" office:value-type="float" office:value="172684.442399298" calcext:value-type="float">
            <text:p>172684</text:p>
          </table:table-cell>
          <table:table-cell table:style-name="ce225" table:formula="of:=SUM([.R58:.AC58])" office:value-type="float" office:value="1288010.08474576" calcext:value-type="float">
            <text:p>1288010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2" calcext:value-type="float">
            <text:p>2</text:p>
          </table:table-cell>
          <table:table-cell table:style-name="ce218" table:formula="of:=+[.C14]+[.C29]+[.C44]" office:value-type="float" office:value="9072.80542986426" calcext:value-type="float">
            <text:p>9073</text:p>
          </table:table-cell>
          <table:table-cell table:style-name="ce218" table:formula="of:=+[.D14]+[.D29]+[.D44]" office:value-type="float" office:value="9159.28104575164" calcext:value-type="float">
            <text:p>9159</text:p>
          </table:table-cell>
          <table:table-cell table:style-name="ce218" table:formula="of:=+[.E14]+[.E29]+[.E44]" office:value-type="float" office:value="9288.99446958271" calcext:value-type="float">
            <text:p>9289</text:p>
          </table:table-cell>
          <table:table-cell table:style-name="ce218" table:formula="of:=+[.F14]+[.F29]+[.F44]" office:value-type="float" office:value="9292.56158873806" calcext:value-type="float">
            <text:p>9293</text:p>
          </table:table-cell>
          <table:table-cell table:style-name="ce218" table:formula="of:=+[.G14]+[.G29]+[.G44]" office:value-type="float" office:value="9163.56158873806" calcext:value-type="float">
            <text:p>9164</text:p>
          </table:table-cell>
          <table:table-cell table:style-name="ce218" table:formula="of:=+[.H14]+[.H29]+[.H44]" office:value-type="float" office:value="9011.87254901961" calcext:value-type="float">
            <text:p>9012</text:p>
          </table:table-cell>
          <table:table-cell table:style-name="ce218" table:formula="of:=+[.I14]+[.I29]+[.I44]" office:value-type="float" office:value="16430.3670186023" calcext:value-type="float">
            <text:p>16430</text:p>
          </table:table-cell>
          <table:table-cell table:style-name="ce218" table:formula="of:=+[.J14]+[.J29]+[.J44]" office:value-type="float" office:value="9735.64102564103" calcext:value-type="float">
            <text:p>9736</text:p>
          </table:table-cell>
          <table:table-cell table:style-name="ce218" table:formula="of:=+[.K14]+[.K29]+[.K44]" office:value-type="float" office:value="9865.3544494721" calcext:value-type="float">
            <text:p>9865</text:p>
          </table:table-cell>
          <table:table-cell table:style-name="ce218" table:formula="of:=+[.L14]+[.L29]+[.L44]" office:value-type="float" office:value="9886.97335344394" calcext:value-type="float">
            <text:p>9887</text:p>
          </table:table-cell>
          <table:table-cell table:style-name="ce218" table:formula="of:=+[.M14]+[.M29]+[.M44]" office:value-type="float" office:value="10797.4643036702" calcext:value-type="float">
            <text:p>10797</text:p>
          </table:table-cell>
          <table:table-cell table:style-name="ce218" table:formula="of:=+[.N14]+[.N29]+[.N44]" office:value-type="float" office:value="17295.1231774761" calcext:value-type="float">
            <text:p>17295</text:p>
          </table:table-cell>
          <table:table-cell table:style-name="ce225" table:formula="of:=SUM([.C59:.N59])" office:value-type="float" office:value="129000" calcext:value-type="float">
            <text:p>129000</text:p>
          </table:table-cell>
          <table:table-cell table:style-name="ce231"/>
          <table:table-cell table:style-name="ce206" office:value-type="float" office:value="2" calcext:value-type="float">
            <text:p>2</text:p>
          </table:table-cell>
          <table:table-cell table:style-name="ce218" table:formula="of:=+[.R14]+[.R29]+[.R44]" office:value-type="float" office:value="100731.433218294" calcext:value-type="float">
            <text:p>100731</text:p>
          </table:table-cell>
          <table:table-cell table:style-name="ce218" table:formula="of:=+[.S14]+[.S29]+[.S44]" office:value-type="float" office:value="101691.53456667" calcext:value-type="float">
            <text:p>101692</text:p>
          </table:table-cell>
          <table:table-cell table:style-name="ce218" table:formula="of:=+[.T14]+[.T29]+[.T44]" office:value-type="float" office:value="103131.686589235" calcext:value-type="float">
            <text:p>103132</text:p>
          </table:table-cell>
          <table:table-cell table:style-name="ce218" table:formula="of:=+[.U14]+[.U29]+[.U44]" office:value-type="float" office:value="103171.290769856" calcext:value-type="float">
            <text:p>103171</text:p>
          </table:table-cell>
          <table:table-cell table:style-name="ce218" table:formula="of:=+[.V14]+[.V29]+[.V44]" office:value-type="float" office:value="101739.059583415" calcext:value-type="float">
            <text:p>101739</text:p>
          </table:table-cell>
          <table:table-cell table:style-name="ce218" table:formula="of:=+[.W14]+[.W29]+[.W44]" office:value-type="float" office:value="100054.921805694" calcext:value-type="float">
            <text:p>100055</text:p>
          </table:table-cell>
          <table:table-cell table:style-name="ce218" table:formula="of:=+[.X14]+[.X29]+[.X44]" office:value-type="float" office:value="182419.256191539" calcext:value-type="float">
            <text:p>182419</text:p>
          </table:table-cell>
          <table:table-cell table:style-name="ce218" table:formula="of:=+[.Y14]+[.Y29]+[.Y44]" office:value-type="float" office:value="108090.6100536" calcext:value-type="float">
            <text:p>108091</text:p>
          </table:table-cell>
          <table:table-cell table:style-name="ce218" table:formula="of:=+[.Z14]+[.Z29]+[.Z44]" office:value-type="float" office:value="109530.762076165" calcext:value-type="float">
            <text:p>109531</text:p>
          </table:table-cell>
          <table:table-cell table:style-name="ce218" table:formula="of:=+[.AA14]+[.AA29]+[.AA44]" office:value-type="float" office:value="109770.787413259" calcext:value-type="float">
            <text:p>109771</text:p>
          </table:table-cell>
          <table:table-cell table:style-name="ce218" table:formula="of:=+[.AB14]+[.AB29]+[.AB44]" office:value-type="float" office:value="119879.574497647" calcext:value-type="float">
            <text:p>119880</text:p>
          </table:table-cell>
          <table:table-cell table:style-name="ce218" table:formula="of:=+[.AC14]+[.AC29]+[.AC44]" office:value-type="float" office:value="192020.269675305" calcext:value-type="float">
            <text:p>192020</text:p>
          </table:table-cell>
          <table:table-cell table:style-name="ce225" table:formula="of:=SUM([.R59:.AC59])" office:value-type="float" office:value="1432231.18644068" calcext:value-type="float">
            <text:p>1432231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3" calcext:value-type="float">
            <text:p>3</text:p>
          </table:table-cell>
          <table:table-cell table:style-name="ce218" table:formula="of:=+[.C15]+[.C30]+[.C45]" office:value-type="float" office:value="9707.90180995475" calcext:value-type="float">
            <text:p>9708</text:p>
          </table:table-cell>
          <table:table-cell table:style-name="ce218" table:formula="of:=+[.D15]+[.D30]+[.D45]" office:value-type="float" office:value="9800.43071895425" calcext:value-type="float">
            <text:p>9800</text:p>
          </table:table-cell>
          <table:table-cell table:style-name="ce218" table:formula="of:=+[.E15]+[.E30]+[.E45]" office:value-type="float" office:value="9939.2240824535" calcext:value-type="float">
            <text:p>9939</text:p>
          </table:table-cell>
          <table:table-cell table:style-name="ce218" table:formula="of:=+[.F15]+[.F30]+[.F45]" office:value-type="float" office:value="9943.04089994972" calcext:value-type="float">
            <text:p>9943</text:p>
          </table:table-cell>
          <table:table-cell table:style-name="ce218" table:formula="of:=+[.G15]+[.G30]+[.G45]" office:value-type="float" office:value="9805.01089994972" calcext:value-type="float">
            <text:p>9805</text:p>
          </table:table-cell>
          <table:table-cell table:style-name="ce218" table:formula="of:=+[.H15]+[.H30]+[.H45]" office:value-type="float" office:value="9642.70362745098" calcext:value-type="float">
            <text:p>9643</text:p>
          </table:table-cell>
          <table:table-cell table:style-name="ce218" table:formula="of:=+[.I15]+[.I30]+[.I45]" office:value-type="float" office:value="17580.4927099045" calcext:value-type="float">
            <text:p>17580</text:p>
          </table:table-cell>
          <table:table-cell table:style-name="ce218" table:formula="of:=+[.J15]+[.J30]+[.J45]" office:value-type="float" office:value="10417.1358974359" calcext:value-type="float">
            <text:p>10417</text:p>
          </table:table-cell>
          <table:table-cell table:style-name="ce218" table:formula="of:=+[.K15]+[.K30]+[.K45]" office:value-type="float" office:value="10555.9292609351" calcext:value-type="float">
            <text:p>10556</text:p>
          </table:table-cell>
          <table:table-cell table:style-name="ce218" table:formula="of:=+[.L15]+[.L30]+[.L45]" office:value-type="float" office:value="10579.061488185" calcext:value-type="float">
            <text:p>10579</text:p>
          </table:table-cell>
          <table:table-cell table:style-name="ce218" table:formula="of:=+[.M15]+[.M30]+[.M45]" office:value-type="float" office:value="11553.2868049271" calcext:value-type="float">
            <text:p>11553</text:p>
          </table:table-cell>
          <table:table-cell table:style-name="ce218" table:formula="of:=+[.N15]+[.N30]+[.N45]" office:value-type="float" office:value="18505.7817998994" calcext:value-type="float">
            <text:p>18506</text:p>
          </table:table-cell>
          <table:table-cell table:style-name="ce225" table:formula="of:=SUM([.C60:.N60])" office:value-type="float" office:value="138030" calcext:value-type="float">
            <text:p>138030</text:p>
          </table:table-cell>
          <table:table-cell table:style-name="ce231"/>
          <table:table-cell table:style-name="ce206" office:value-type="float" office:value="3" calcext:value-type="float">
            <text:p>3</text:p>
          </table:table-cell>
          <table:table-cell table:style-name="ce218" table:formula="of:=+[.R15]+[.R30]+[.R45]" office:value-type="float" office:value="107782.633543574" calcext:value-type="float">
            <text:p>107783</text:p>
          </table:table-cell>
          <table:table-cell table:style-name="ce218" table:formula="of:=+[.S15]+[.S30]+[.S45]" office:value-type="float" office:value="108809.941986337" calcext:value-type="float">
            <text:p>108810</text:p>
          </table:table-cell>
          <table:table-cell table:style-name="ce218" table:formula="of:=+[.T15]+[.T30]+[.T45]" office:value-type="float" office:value="110350.904650482" calcext:value-type="float">
            <text:p>110351</text:p>
          </table:table-cell>
          <table:table-cell table:style-name="ce218" table:formula="of:=+[.U15]+[.U30]+[.U45]" office:value-type="float" office:value="110393.281123746" calcext:value-type="float">
            <text:p>110393</text:p>
          </table:table-cell>
          <table:table-cell table:style-name="ce218" table:formula="of:=+[.V15]+[.V30]+[.V45]" office:value-type="float" office:value="108860.793754254" calcext:value-type="float">
            <text:p>108861</text:p>
          </table:table-cell>
          <table:table-cell table:style-name="ce218" table:formula="of:=+[.W15]+[.W30]+[.W45]" office:value-type="float" office:value="107058.766332093" calcext:value-type="float">
            <text:p>107059</text:p>
          </table:table-cell>
          <table:table-cell table:style-name="ce218" table:formula="of:=+[.X15]+[.X30]+[.X45]" office:value-type="float" office:value="195188.604124947" calcext:value-type="float">
            <text:p>195189</text:p>
          </table:table-cell>
          <table:table-cell table:style-name="ce218" table:formula="of:=+[.Y15]+[.Y30]+[.Y45]" office:value-type="float" office:value="115656.952757352" calcext:value-type="float">
            <text:p>115657</text:p>
          </table:table-cell>
          <table:table-cell table:style-name="ce218" table:formula="of:=+[.Z15]+[.Z30]+[.Z45]" office:value-type="float" office:value="117197.915421496" calcext:value-type="float">
            <text:p>117198</text:p>
          </table:table-cell>
          <table:table-cell table:style-name="ce218" table:formula="of:=+[.AA15]+[.AA30]+[.AA45]" office:value-type="float" office:value="117454.742532187" calcext:value-type="float">
            <text:p>117455</text:p>
          </table:table-cell>
          <table:table-cell table:style-name="ce218" table:formula="of:=+[.AB15]+[.AB30]+[.AB45]" office:value-type="float" office:value="128271.144712482" calcext:value-type="float">
            <text:p>128271</text:p>
          </table:table-cell>
          <table:table-cell table:style-name="ce218" table:formula="of:=+[.AC15]+[.AC30]+[.AC45]" office:value-type="float" office:value="205461.688552576" calcext:value-type="float">
            <text:p>205462</text:p>
          </table:table-cell>
          <table:table-cell table:style-name="ce225" table:formula="of:=SUM([.R60:.AC60])" office:value-type="float" office:value="1532487.36949153" calcext:value-type="float">
            <text:p>1532487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4" calcext:value-type="float">
            <text:p>4</text:p>
          </table:table-cell>
          <table:table-cell table:style-name="ce218" table:formula="of:=+[.C16]+[.C31]+[.C46]" office:value-type="float" office:value="10387.4549366516" calcext:value-type="float">
            <text:p>10387</text:p>
          </table:table-cell>
          <table:table-cell table:style-name="ce218" table:formula="of:=+[.D16]+[.D31]+[.D46]" office:value-type="float" office:value="10486.4608692811" calcext:value-type="float">
            <text:p>10486</text:p>
          </table:table-cell>
          <table:table-cell table:style-name="ce218" table:formula="of:=+[.E16]+[.E31]+[.E46]" office:value-type="float" office:value="10634.9697682252" calcext:value-type="float">
            <text:p>10635</text:p>
          </table:table-cell>
          <table:table-cell table:style-name="ce218" table:formula="of:=+[.F16]+[.F31]+[.F46]" office:value-type="float" office:value="10639.0537629462" calcext:value-type="float">
            <text:p>10639</text:p>
          </table:table-cell>
          <table:table-cell table:style-name="ce218" table:formula="of:=+[.G16]+[.G31]+[.G46]" office:value-type="float" office:value="10491.3616629462" calcext:value-type="float">
            <text:p>10491</text:p>
          </table:table-cell>
          <table:table-cell table:style-name="ce218" table:formula="of:=+[.H16]+[.H31]+[.H46]" office:value-type="float" office:value="10317.6928813725" calcext:value-type="float">
            <text:p>10318</text:p>
          </table:table-cell>
          <table:table-cell table:style-name="ce218" table:formula="of:=+[.I16]+[.I31]+[.I46]" office:value-type="float" office:value="18811.1271995978" calcext:value-type="float">
            <text:p>18811</text:p>
          </table:table-cell>
          <table:table-cell table:style-name="ce218" table:formula="of:=+[.J16]+[.J31]+[.J46]" office:value-type="float" office:value="11146.3354102564" calcext:value-type="float">
            <text:p>11146</text:p>
          </table:table-cell>
          <table:table-cell table:style-name="ce218" table:formula="of:=+[.K16]+[.K31]+[.K46]" office:value-type="float" office:value="11294.8443092006" calcext:value-type="float">
            <text:p>11295</text:p>
          </table:table-cell>
          <table:table-cell table:style-name="ce218" table:formula="of:=+[.L16]+[.L31]+[.L46]" office:value-type="float" office:value="11319.595792358" calcext:value-type="float">
            <text:p>11320</text:p>
          </table:table-cell>
          <table:table-cell table:style-name="ce218" table:formula="of:=+[.M16]+[.M31]+[.M46]" office:value-type="float" office:value="12362.016881272" calcext:value-type="float">
            <text:p>12362</text:p>
          </table:table-cell>
          <table:table-cell table:style-name="ce218" table:formula="of:=+[.N16]+[.N31]+[.N46]" office:value-type="float" office:value="19801.1865258924" calcext:value-type="float">
            <text:p>19801</text:p>
          </table:table-cell>
          <table:table-cell table:style-name="ce225" table:formula="of:=SUM([.C61:.N61])" office:value-type="float" office:value="147692.1" calcext:value-type="float">
            <text:p>147692</text:p>
          </table:table-cell>
          <table:table-cell table:style-name="ce231"/>
          <table:table-cell table:style-name="ce206" office:value-type="float" office:value="4" calcext:value-type="float">
            <text:p>4</text:p>
          </table:table-cell>
          <table:table-cell table:style-name="ce218" table:formula="of:=+[.R16]+[.R31]+[.R46]" office:value-type="float" office:value="115327.417891625" calcext:value-type="float">
            <text:p>115327</text:p>
          </table:table-cell>
          <table:table-cell table:style-name="ce218" table:formula="of:=+[.S16]+[.S31]+[.S46]" office:value-type="float" office:value="116426.637925381" calcext:value-type="float">
            <text:p>116427</text:p>
          </table:table-cell>
          <table:table-cell table:style-name="ce218" table:formula="of:=+[.T16]+[.T31]+[.T46]" office:value-type="float" office:value="118075.467976015" calcext:value-type="float">
            <text:p>118075</text:p>
          </table:table-cell>
          <table:table-cell table:style-name="ce218" table:formula="of:=+[.U16]+[.U31]+[.U46]" office:value-type="float" office:value="118120.810802408" calcext:value-type="float">
            <text:p>118121</text:p>
          </table:table-cell>
          <table:table-cell table:style-name="ce218" table:formula="of:=+[.V16]+[.V31]+[.V46]" office:value-type="float" office:value="116481.049317052" calcext:value-type="float">
            <text:p>116481</text:p>
          </table:table-cell>
          <table:table-cell table:style-name="ce218" table:formula="of:=+[.W16]+[.W31]+[.W46]" office:value-type="float" office:value="114552.879975339" calcext:value-type="float">
            <text:p>114553</text:p>
          </table:table-cell>
          <table:table-cell table:style-name="ce218" table:formula="of:=+[.X16]+[.X31]+[.X46]" office:value-type="float" office:value="208851.806413693" calcext:value-type="float">
            <text:p>208852</text:p>
          </table:table-cell>
          <table:table-cell table:style-name="ce218" table:formula="of:=+[.Y16]+[.Y31]+[.Y46]" office:value-type="float" office:value="123752.939450367" calcext:value-type="float">
            <text:p>123753</text:p>
          </table:table-cell>
          <table:table-cell table:style-name="ce218" table:formula="of:=+[.Z16]+[.Z31]+[.Z46]" office:value-type="float" office:value="125401.769501001" calcext:value-type="float">
            <text:p>125402</text:p>
          </table:table-cell>
          <table:table-cell table:style-name="ce218" table:formula="of:=+[.AA16]+[.AA31]+[.AA46]" office:value-type="float" office:value="125676.57450944" calcext:value-type="float">
            <text:p>125677</text:p>
          </table:table-cell>
          <table:table-cell table:style-name="ce218" table:formula="of:=+[.AB16]+[.AB31]+[.AB46]" office:value-type="float" office:value="137250.124842356" calcext:value-type="float">
            <text:p>137250</text:p>
          </table:table-cell>
          <table:table-cell table:style-name="ce218" table:formula="of:=+[.AC16]+[.AC31]+[.AC46]" office:value-type="float" office:value="219844.006751256" calcext:value-type="float">
            <text:p>219844</text:p>
          </table:table-cell>
          <table:table-cell table:style-name="ce225" table:formula="of:=SUM([.R61:.AC61])" office:value-type="float" office:value="1639761.48535593" calcext:value-type="float">
            <text:p>1639761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5" calcext:value-type="float">
            <text:p>5</text:p>
          </table:table-cell>
          <table:table-cell table:style-name="ce218" table:formula="of:=+[.C17]+[.C32]+[.C47]" office:value-type="float" office:value="11114.5767822172" calcext:value-type="float">
            <text:p>11115</text:p>
          </table:table-cell>
          <table:table-cell table:style-name="ce218" table:formula="of:=+[.D17]+[.D32]+[.D47]" office:value-type="float" office:value="11220.5131301307" calcext:value-type="float">
            <text:p>11221</text:p>
          </table:table-cell>
          <table:table-cell table:style-name="ce218" table:formula="of:=+[.E17]+[.E32]+[.E47]" office:value-type="float" office:value="11379.417652001" calcext:value-type="float">
            <text:p>11379</text:p>
          </table:table-cell>
          <table:table-cell table:style-name="ce218" table:formula="of:=+[.F17]+[.F32]+[.F47]" office:value-type="float" office:value="11383.7875263524" calcext:value-type="float">
            <text:p>11384</text:p>
          </table:table-cell>
          <table:table-cell table:style-name="ce218" table:formula="of:=+[.G17]+[.G32]+[.G47]" office:value-type="float" office:value="11225.7569793524" calcext:value-type="float">
            <text:p>11226</text:p>
          </table:table-cell>
          <table:table-cell table:style-name="ce218" table:formula="of:=+[.H17]+[.H32]+[.H47]" office:value-type="float" office:value="11039.9313830686" calcext:value-type="float">
            <text:p>11040</text:p>
          </table:table-cell>
          <table:table-cell table:style-name="ce218" table:formula="of:=+[.I17]+[.I32]+[.I47]" office:value-type="float" office:value="20127.9061035696" calcext:value-type="float">
            <text:p>20128</text:p>
          </table:table-cell>
          <table:table-cell table:style-name="ce218" table:formula="of:=+[.J17]+[.J32]+[.J47]" office:value-type="float" office:value="11926.5788889744" calcext:value-type="float">
            <text:p>11927</text:p>
          </table:table-cell>
          <table:table-cell table:style-name="ce218" table:formula="of:=+[.K17]+[.K32]+[.K47]" office:value-type="float" office:value="12085.4834108446" calcext:value-type="float">
            <text:p>12085</text:p>
          </table:table-cell>
          <table:table-cell table:style-name="ce218" table:formula="of:=+[.L17]+[.L32]+[.L47]" office:value-type="float" office:value="12111.967497823" calcext:value-type="float">
            <text:p>12112</text:p>
          </table:table-cell>
          <table:table-cell table:style-name="ce218" table:formula="of:=+[.M17]+[.M32]+[.M47]" office:value-type="float" office:value="13227.358062961" calcext:value-type="float">
            <text:p>13227</text:p>
          </table:table-cell>
          <table:table-cell table:style-name="ce218" table:formula="of:=+[.N17]+[.N32]+[.N47]" office:value-type="float" office:value="21187.2695827049" calcext:value-type="float">
            <text:p>21187</text:p>
          </table:table-cell>
          <table:table-cell table:style-name="ce225" table:formula="of:=SUM([.C62:.N62])" office:value-type="float" office:value="158030.547" calcext:value-type="float">
            <text:p>158031</text:p>
          </table:table-cell>
          <table:table-cell table:style-name="ce231"/>
          <table:table-cell table:style-name="ce206" office:value-type="float" office:value="5" calcext:value-type="float">
            <text:p>5</text:p>
          </table:table-cell>
          <table:table-cell table:style-name="ce218" table:formula="of:=+[.R17]+[.R32]+[.R47]" office:value-type="float" office:value="123400.337144038" calcext:value-type="float">
            <text:p>123400</text:p>
          </table:table-cell>
          <table:table-cell table:style-name="ce218" table:formula="of:=+[.S17]+[.S32]+[.S47]" office:value-type="float" office:value="124576.502580158" calcext:value-type="float">
            <text:p>124577</text:p>
          </table:table-cell>
          <table:table-cell table:style-name="ce218" table:formula="of:=+[.T17]+[.T32]+[.T47]" office:value-type="float" office:value="126340.750734336" calcext:value-type="float">
            <text:p>126341</text:p>
          </table:table-cell>
          <table:table-cell table:style-name="ce218" table:formula="of:=+[.U17]+[.U32]+[.U47]" office:value-type="float" office:value="126389.267558576" calcext:value-type="float">
            <text:p>126389</text:p>
          </table:table-cell>
          <table:table-cell table:style-name="ce218" table:formula="of:=+[.V17]+[.V32]+[.V47]" office:value-type="float" office:value="124634.722769245" calcext:value-type="float">
            <text:p>124635</text:p>
          </table:table-cell>
          <table:table-cell table:style-name="ce218" table:formula="of:=+[.W17]+[.W32]+[.W47]" office:value-type="float" office:value="122571.581573613" calcext:value-type="float">
            <text:p>122572</text:p>
          </table:table-cell>
          <table:table-cell table:style-name="ce218" table:formula="of:=+[.X17]+[.X32]+[.X47]" office:value-type="float" office:value="223471.432862652" calcext:value-type="float">
            <text:p>223471</text:p>
          </table:table-cell>
          <table:table-cell table:style-name="ce218" table:formula="of:=+[.Y17]+[.Y32]+[.Y47]" office:value-type="float" office:value="132415.645211892" calcext:value-type="float">
            <text:p>132416</text:p>
          </table:table-cell>
          <table:table-cell table:style-name="ce218" table:formula="of:=+[.Z17]+[.Z32]+[.Z47]" office:value-type="float" office:value="134179.893366071" calcext:value-type="float">
            <text:p>134180</text:p>
          </table:table-cell>
          <table:table-cell table:style-name="ce218" table:formula="of:=+[.AA17]+[.AA32]+[.AA47]" office:value-type="float" office:value="134473.934725101" calcext:value-type="float">
            <text:p>134474</text:p>
          </table:table-cell>
          <table:table-cell table:style-name="ce218" table:formula="of:=+[.AB17]+[.AB32]+[.AB47]" office:value-type="float" office:value="146857.63358132" calcext:value-type="float">
            <text:p>146858</text:p>
          </table:table-cell>
          <table:table-cell table:style-name="ce218" table:formula="of:=+[.AC17]+[.AC32]+[.AC47]" office:value-type="float" office:value="235233.087223844" calcext:value-type="float">
            <text:p>235233</text:p>
          </table:table-cell>
          <table:table-cell table:style-name="ce225" table:formula="of:=SUM([.R62:.AC62])" office:value-type="float" office:value="1754544.78933085" calcext:value-type="float">
            <text:p>1754545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6" calcext:value-type="float">
            <text:p>6</text:p>
          </table:table-cell>
          <table:table-cell table:style-name="ce218" table:formula="of:=+[.C18]+[.C33]+[.C48]" office:value-type="float" office:value="11892.5971569724" calcext:value-type="float">
            <text:p>11893</text:p>
          </table:table-cell>
          <table:table-cell table:style-name="ce218" table:formula="of:=+[.D18]+[.D33]+[.D48]" office:value-type="float" office:value="12005.9490492399" calcext:value-type="float">
            <text:p>12006</text:p>
          </table:table-cell>
          <table:table-cell table:style-name="ce218" table:formula="of:=+[.E18]+[.E33]+[.E48]" office:value-type="float" office:value="12175.9768876411" calcext:value-type="float">
            <text:p>12176</text:p>
          </table:table-cell>
          <table:table-cell table:style-name="ce218" table:formula="of:=+[.F18]+[.F33]+[.F48]" office:value-type="float" office:value="12180.6526531971" calcext:value-type="float">
            <text:p>12181</text:p>
          </table:table-cell>
          <table:table-cell table:style-name="ce218" table:formula="of:=+[.G18]+[.G33]+[.G48]" office:value-type="float" office:value="12011.5599679071" calcext:value-type="float">
            <text:p>12012</text:p>
          </table:table-cell>
          <table:table-cell table:style-name="ce218" table:formula="of:=+[.H18]+[.H33]+[.H48]" office:value-type="float" office:value="11812.7265798834" calcext:value-type="float">
            <text:p>11813</text:p>
          </table:table-cell>
          <table:table-cell table:style-name="ce218" table:formula="of:=+[.I18]+[.I33]+[.I48]" office:value-type="float" office:value="21536.8595308195" calcext:value-type="float">
            <text:p>21537</text:p>
          </table:table-cell>
          <table:table-cell table:style-name="ce218" table:formula="of:=+[.J18]+[.J33]+[.J48]" office:value-type="float" office:value="12761.4394112026" calcext:value-type="float">
            <text:p>12761</text:p>
          </table:table-cell>
          <table:table-cell table:style-name="ce218" table:formula="of:=+[.K18]+[.K33]+[.K48]" office:value-type="float" office:value="12931.4672496038" calcext:value-type="float">
            <text:p>12931</text:p>
          </table:table-cell>
          <table:table-cell table:style-name="ce218" table:formula="of:=+[.L18]+[.L33]+[.L48]" office:value-type="float" office:value="12959.8052226706" calcext:value-type="float">
            <text:p>12960</text:p>
          </table:table-cell>
          <table:table-cell table:style-name="ce218" table:formula="of:=+[.M18]+[.M33]+[.M48]" office:value-type="float" office:value="14153.2731273683" calcext:value-type="float">
            <text:p>14153</text:p>
          </table:table-cell>
          <table:table-cell table:style-name="ce218" table:formula="of:=+[.N18]+[.N33]+[.N48]" office:value-type="float" office:value="22670.3784534942" calcext:value-type="float">
            <text:p>22670</text:p>
          </table:table-cell>
          <table:table-cell table:style-name="ce225" table:formula="of:=SUM([.C63:.N63])" office:value-type="float" office:value="169092.68529" calcext:value-type="float">
            <text:p>169093</text:p>
          </table:table-cell>
          <table:table-cell table:style-name="ce231"/>
          <table:table-cell table:style-name="ce206" office:value-type="float" office:value="6" calcext:value-type="float">
            <text:p>6</text:p>
          </table:table-cell>
          <table:table-cell table:style-name="ce218" table:formula="of:=+[.R18]+[.R33]+[.R48]" office:value-type="float" office:value="132038.360744121" calcext:value-type="float">
            <text:p>132038</text:p>
          </table:table-cell>
          <table:table-cell table:style-name="ce218" table:formula="of:=+[.S18]+[.S33]+[.S48]" office:value-type="float" office:value="133296.857760769" calcext:value-type="float">
            <text:p>133297</text:p>
          </table:table-cell>
          <table:table-cell table:style-name="ce218" table:formula="of:=+[.T18]+[.T33]+[.T48]" office:value-type="float" office:value="135184.60328574" calcext:value-type="float">
            <text:p>135185</text:p>
          </table:table-cell>
          <table:table-cell table:style-name="ce218" table:formula="of:=+[.U18]+[.U33]+[.U48]" office:value-type="float" office:value="135236.516287677" calcext:value-type="float">
            <text:p>135237</text:p>
          </table:table-cell>
          <table:table-cell table:style-name="ce218" table:formula="of:=+[.V18]+[.V33]+[.V48]" office:value-type="float" office:value="133359.153363093" calcext:value-type="float">
            <text:p>133359</text:p>
          </table:table-cell>
          <table:table-cell table:style-name="ce218" table:formula="of:=+[.W18]+[.W33]+[.W48]" office:value-type="float" office:value="131151.592283766" calcext:value-type="float">
            <text:p>131152</text:p>
          </table:table-cell>
          <table:table-cell table:style-name="ce218" table:formula="of:=+[.X18]+[.X33]+[.X48]" office:value-type="float" office:value="239114.433163038" calcext:value-type="float">
            <text:p>239114</text:p>
          </table:table-cell>
          <table:table-cell table:style-name="ce218" table:formula="of:=+[.Y18]+[.Y33]+[.Y48]" office:value-type="float" office:value="141684.740376725" calcext:value-type="float">
            <text:p>141685</text:p>
          </table:table-cell>
          <table:table-cell table:style-name="ce218" table:formula="of:=+[.Z18]+[.Z33]+[.Z48]" office:value-type="float" office:value="143572.485901696" calcext:value-type="float">
            <text:p>143572</text:p>
          </table:table-cell>
          <table:table-cell table:style-name="ce218" table:formula="of:=+[.AA18]+[.AA33]+[.AA48]" office:value-type="float" office:value="143887.110155858" calcext:value-type="float">
            <text:p>143887</text:p>
          </table:table-cell>
          <table:table-cell table:style-name="ce218" table:formula="of:=+[.AB18]+[.AB33]+[.AB48]" office:value-type="float" office:value="157137.667932013" calcext:value-type="float">
            <text:p>157138</text:p>
          </table:table-cell>
          <table:table-cell table:style-name="ce218" table:formula="of:=+[.AC18]+[.AC33]+[.AC48]" office:value-type="float" office:value="251699.403329513" calcext:value-type="float">
            <text:p>251699</text:p>
          </table:table-cell>
          <table:table-cell table:style-name="ce225" table:formula="of:=SUM([.R63:.AC63])" office:value-type="float" office:value="1877362.92458401" calcext:value-type="float">
            <text:p>1877363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7" calcext:value-type="float">
            <text:p>7</text:p>
          </table:table-cell>
          <table:table-cell table:style-name="ce218" table:formula="of:=+[.C19]+[.C34]+[.C49]" office:value-type="float" office:value="12725.0789579605" calcext:value-type="float">
            <text:p>12725</text:p>
          </table:table-cell>
          <table:table-cell table:style-name="ce218" table:formula="of:=+[.D19]+[.D34]+[.D49]" office:value-type="float" office:value="12846.3654826867" calcext:value-type="float">
            <text:p>12846</text:p>
          </table:table-cell>
          <table:table-cell table:style-name="ce218" table:formula="of:=+[.E19]+[.E34]+[.E49]" office:value-type="float" office:value="13028.295269776" calcext:value-type="float">
            <text:p>13028</text:p>
          </table:table-cell>
          <table:table-cell table:style-name="ce218" table:formula="of:=+[.F19]+[.F34]+[.F49]" office:value-type="float" office:value="13033.2983389209" calcext:value-type="float">
            <text:p>13033</text:p>
          </table:table-cell>
          <table:table-cell table:style-name="ce218" table:formula="of:=+[.G19]+[.G34]+[.G49]" office:value-type="float" office:value="12852.3691656606" calcext:value-type="float">
            <text:p>12852</text:p>
          </table:table-cell>
          <table:table-cell table:style-name="ce218" table:formula="of:=+[.H19]+[.H34]+[.H49]" office:value-type="float" office:value="12639.6174404753" calcext:value-type="float">
            <text:p>12640</text:p>
          </table:table-cell>
          <table:table-cell table:style-name="ce218" table:formula="of:=+[.I19]+[.I34]+[.I49]" office:value-type="float" office:value="23044.4396979769" calcext:value-type="float">
            <text:p>23044</text:p>
          </table:table-cell>
          <table:table-cell table:style-name="ce218" table:formula="of:=+[.J19]+[.J34]+[.J49]" office:value-type="float" office:value="13654.7401699868" calcext:value-type="float">
            <text:p>13655</text:p>
          </table:table-cell>
          <table:table-cell table:style-name="ce218" table:formula="of:=+[.K19]+[.K34]+[.K49]" office:value-type="float" office:value="13836.669957076" calcext:value-type="float">
            <text:p>13837</text:p>
          </table:table-cell>
          <table:table-cell table:style-name="ce218" table:formula="of:=+[.L19]+[.L34]+[.L49]" office:value-type="float" office:value="13866.9915882576" calcext:value-type="float">
            <text:p>13867</text:p>
          </table:table-cell>
          <table:table-cell table:style-name="ce218" table:formula="of:=+[.M19]+[.M34]+[.M49]" office:value-type="float" office:value="15144.0022462841" calcext:value-type="float">
            <text:p>15144</text:p>
          </table:table-cell>
          <table:table-cell table:style-name="ce218" table:formula="of:=+[.N19]+[.N34]+[.N49]" office:value-type="float" office:value="24257.3049452388" calcext:value-type="float">
            <text:p>24257</text:p>
          </table:table-cell>
          <table:table-cell table:style-name="ce225" table:formula="of:=SUM([.C64:.N64])" office:value-type="float" office:value="180929.1732603" calcext:value-type="float">
            <text:p>180929</text:p>
          </table:table-cell>
          <table:table-cell table:style-name="ce231"/>
          <table:table-cell table:style-name="ce206" office:value-type="float" office:value="7" calcext:value-type="float">
            <text:p>7</text:p>
          </table:table-cell>
          <table:table-cell table:style-name="ce218" table:formula="of:=+[.R19]+[.R34]+[.R49]" office:value-type="float" office:value="141281.04599621" calcext:value-type="float">
            <text:p>141281</text:p>
          </table:table-cell>
          <table:table-cell table:style-name="ce218" table:formula="of:=+[.S19]+[.S34]+[.S49]" office:value-type="float" office:value="142627.637804022" calcext:value-type="float">
            <text:p>142628</text:p>
          </table:table-cell>
          <table:table-cell table:style-name="ce218" table:formula="of:=+[.T19]+[.T34]+[.T49]" office:value-type="float" office:value="144647.525515742" calcext:value-type="float">
            <text:p>144648</text:p>
          </table:table-cell>
          <table:table-cell table:style-name="ce218" table:formula="of:=+[.U19]+[.U34]+[.U49]" office:value-type="float" office:value="144703.072427814" calcext:value-type="float">
            <text:p>144703</text:p>
          </table:table-cell>
          <table:table-cell table:style-name="ce218" table:formula="of:=+[.V19]+[.V34]+[.V49]" office:value-type="float" office:value="142694.294098509" calcext:value-type="float">
            <text:p>142694</text:p>
          </table:table-cell>
          <table:table-cell table:style-name="ce218" table:formula="of:=+[.W19]+[.W34]+[.W49]" office:value-type="float" office:value="140332.203743629" calcext:value-type="float">
            <text:p>140332</text:p>
          </table:table-cell>
          <table:table-cell table:style-name="ce218" table:formula="of:=+[.X19]+[.X34]+[.X49]" office:value-type="float" office:value="255852.44348445" calcext:value-type="float">
            <text:p>255852</text:p>
          </table:table-cell>
          <table:table-cell table:style-name="ce218" table:formula="of:=+[.Y19]+[.Y34]+[.Y49]" office:value-type="float" office:value="151602.672203095" calcext:value-type="float">
            <text:p>151603</text:p>
          </table:table-cell>
          <table:table-cell table:style-name="ce218" table:formula="of:=+[.Z19]+[.Z34]+[.Z49]" office:value-type="float" office:value="153622.559914815" calcext:value-type="float">
            <text:p>153623</text:p>
          </table:table-cell>
          <table:table-cell table:style-name="ce218" table:formula="of:=+[.AA19]+[.AA34]+[.AA49]" office:value-type="float" office:value="153959.207866768" calcext:value-type="float">
            <text:p>153959</text:p>
          </table:table-cell>
          <table:table-cell table:style-name="ce218" table:formula="of:=+[.AB19]+[.AB34]+[.AB49]" office:value-type="float" office:value="168137.304687254" calcext:value-type="float">
            <text:p>168137</text:p>
          </table:table-cell>
          <table:table-cell table:style-name="ce218" table:formula="of:=+[.AC19]+[.AC34]+[.AC49]" office:value-type="float" office:value="269318.361562579" calcext:value-type="float">
            <text:p>269318</text:p>
          </table:table-cell>
          <table:table-cell table:style-name="ce225" table:formula="of:=SUM([.R64:.AC64])" office:value-type="float" office:value="2008778.32930489" calcext:value-type="float">
            <text:p>2008778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8" calcext:value-type="float">
            <text:p>8</text:p>
          </table:table-cell>
          <table:table-cell table:style-name="ce218" table:formula="of:=+[.C20]+[.C35]+[.C50]" office:value-type="float" office:value="13615.8344850177" calcext:value-type="float">
            <text:p>13616</text:p>
          </table:table-cell>
          <table:table-cell table:style-name="ce218" table:formula="of:=+[.D20]+[.D35]+[.D50]" office:value-type="float" office:value="13745.6110664747" calcext:value-type="float">
            <text:p>13746</text:p>
          </table:table-cell>
          <table:table-cell table:style-name="ce218" table:formula="of:=+[.E20]+[.E35]+[.E50]" office:value-type="float" office:value="13940.2759386603" calcext:value-type="float">
            <text:p>13940</text:p>
          </table:table-cell>
          <table:table-cell table:style-name="ce218" table:formula="of:=+[.F20]+[.F35]+[.F50]" office:value-type="float" office:value="13945.6292226454" calcext:value-type="float">
            <text:p>13946</text:p>
          </table:table-cell>
          <table:table-cell table:style-name="ce218" table:formula="of:=+[.G20]+[.G35]+[.G50]" office:value-type="float" office:value="13752.0350072569" calcext:value-type="float">
            <text:p>13752</text:p>
          </table:table-cell>
          <table:table-cell table:style-name="ce218" table:formula="of:=+[.H20]+[.H35]+[.H50]" office:value-type="float" office:value="13524.3906613085" calcext:value-type="float">
            <text:p>13524</text:p>
          </table:table-cell>
          <table:table-cell table:style-name="ce218" table:formula="of:=+[.I20]+[.I35]+[.I50]" office:value-type="float" office:value="24657.5504768353" calcext:value-type="float">
            <text:p>24658</text:p>
          </table:table-cell>
          <table:table-cell table:style-name="ce218" table:formula="of:=+[.J20]+[.J35]+[.J50]" office:value-type="float" office:value="14610.5719818858" calcext:value-type="float">
            <text:p>14611</text:p>
          </table:table-cell>
          <table:table-cell table:style-name="ce218" table:formula="of:=+[.K20]+[.K35]+[.K50]" office:value-type="float" office:value="14805.2368540714" calcext:value-type="float">
            <text:p>14805</text:p>
          </table:table-cell>
          <table:table-cell table:style-name="ce218" table:formula="of:=+[.L20]+[.L35]+[.L50]" office:value-type="float" office:value="14837.6809994356" calcext:value-type="float">
            <text:p>14838</text:p>
          </table:table-cell>
          <table:table-cell table:style-name="ce218" table:formula="of:=+[.M20]+[.M35]+[.M50]" office:value-type="float" office:value="16204.082403524" calcext:value-type="float">
            <text:p>16204</text:p>
          </table:table-cell>
          <table:table-cell table:style-name="ce218" table:formula="of:=+[.N20]+[.N35]+[.N50]" office:value-type="float" office:value="25955.3162914055" calcext:value-type="float">
            <text:p>25955</text:p>
          </table:table-cell>
          <table:table-cell table:style-name="ce225" table:formula="of:=SUM([.C65:.N65])" office:value-type="float" office:value="193594.215388521" calcext:value-type="float">
            <text:p>193594</text:p>
          </table:table-cell>
          <table:table-cell table:style-name="ce231"/>
          <table:table-cell table:style-name="ce206" office:value-type="float" office:value="8" calcext:value-type="float">
            <text:p>8</text:p>
          </table:table-cell>
          <table:table-cell table:style-name="ce218" table:formula="of:=+[.R20]+[.R35]+[.R50]" office:value-type="float" office:value="151170.719215944" calcext:value-type="float">
            <text:p>151171</text:p>
          </table:table-cell>
          <table:table-cell table:style-name="ce218" table:formula="of:=+[.S20]+[.S35]+[.S50]" office:value-type="float" office:value="152611.572450304" calcext:value-type="float">
            <text:p>152612</text:p>
          </table:table-cell>
          <table:table-cell table:style-name="ce218" table:formula="of:=+[.T20]+[.T35]+[.T50]" office:value-type="float" office:value="154772.852301844" calcext:value-type="float">
            <text:p>154773</text:p>
          </table:table-cell>
          <table:table-cell table:style-name="ce218" table:formula="of:=+[.U20]+[.U35]+[.U50]" office:value-type="float" office:value="154832.287497761" calcext:value-type="float">
            <text:p>154832</text:p>
          </table:table-cell>
          <table:table-cell table:style-name="ce218" table:formula="of:=+[.V20]+[.V35]+[.V50]" office:value-type="float" office:value="152682.894685405" calcext:value-type="float">
            <text:p>152683</text:p>
          </table:table-cell>
          <table:table-cell table:style-name="ce218" table:formula="of:=+[.W20]+[.W35]+[.W50]" office:value-type="float" office:value="150155.458005683" calcext:value-type="float">
            <text:p>150155</text:p>
          </table:table-cell>
          <table:table-cell table:style-name="ce218" table:formula="of:=+[.X20]+[.X35]+[.X50]" office:value-type="float" office:value="273762.114528362" calcext:value-type="float">
            <text:p>273762</text:p>
          </table:table-cell>
          <table:table-cell table:style-name="ce218" table:formula="of:=+[.Y20]+[.Y35]+[.Y50]" office:value-type="float" office:value="162214.859257312" calcext:value-type="float">
            <text:p>162215</text:p>
          </table:table-cell>
          <table:table-cell table:style-name="ce218" table:formula="of:=+[.Z20]+[.Z35]+[.Z50]" office:value-type="float" office:value="164376.139108852" calcext:value-type="float">
            <text:p>164376</text:p>
          </table:table-cell>
          <table:table-cell table:style-name="ce218" table:formula="of:=+[.AA20]+[.AA35]+[.AA50]" office:value-type="float" office:value="164736.352417442" calcext:value-type="float">
            <text:p>164736</text:p>
          </table:table-cell>
          <table:table-cell table:style-name="ce218" table:formula="of:=+[.AB20]+[.AB35]+[.AB50]" office:value-type="float" office:value="179906.916015362" calcext:value-type="float">
            <text:p>179907</text:p>
          </table:table-cell>
          <table:table-cell table:style-name="ce218" table:formula="of:=+[.AC20]+[.AC35]+[.AC50]" office:value-type="float" office:value="288170.64687196" calcext:value-type="float">
            <text:p>288171</text:p>
          </table:table-cell>
          <table:table-cell table:style-name="ce225" table:formula="of:=SUM([.R65:.AC65])" office:value-type="float" office:value="2149392.81235623" calcext:value-type="float">
            <text:p>2149393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9" calcext:value-type="float">
            <text:p>9</text:p>
          </table:table-cell>
          <table:table-cell table:style-name="ce218" table:formula="of:=+[.C21]+[.C36]+[.C51]" office:value-type="float" office:value="14568.9428989689" calcext:value-type="float">
            <text:p>14569</text:p>
          </table:table-cell>
          <table:table-cell table:style-name="ce218" table:formula="of:=+[.D21]+[.D36]+[.D51]" office:value-type="float" office:value="14707.803841128" calcext:value-type="float">
            <text:p>14708</text:p>
          </table:table-cell>
          <table:table-cell table:style-name="ce218" table:formula="of:=+[.E21]+[.E36]+[.E51]" office:value-type="float" office:value="14916.0952543665" calcext:value-type="float">
            <text:p>14916</text:p>
          </table:table-cell>
          <table:table-cell table:style-name="ce218" table:formula="of:=+[.F21]+[.F36]+[.F51]" office:value-type="float" office:value="14921.8232682306" calcext:value-type="float">
            <text:p>14922</text:p>
          </table:table-cell>
          <table:table-cell table:style-name="ce218" table:formula="of:=+[.G21]+[.G36]+[.G51]" office:value-type="float" office:value="14714.6774577648" calcext:value-type="float">
            <text:p>14715</text:p>
          </table:table-cell>
          <table:table-cell table:style-name="ce218" table:formula="of:=+[.H21]+[.H36]+[.H51]" office:value-type="float" office:value="14471.0980076001" calcext:value-type="float">
            <text:p>14471</text:p>
          </table:table-cell>
          <table:table-cell table:style-name="ce218" table:formula="of:=+[.I21]+[.I36]+[.I51]" office:value-type="float" office:value="26383.5790102137" calcext:value-type="float">
            <text:p>26384</text:p>
          </table:table-cell>
          <table:table-cell table:style-name="ce218" table:formula="of:=+[.J21]+[.J36]+[.J51]" office:value-type="float" office:value="15633.3120206178" calcext:value-type="float">
            <text:p>15633</text:p>
          </table:table-cell>
          <table:table-cell table:style-name="ce218" table:formula="of:=+[.K21]+[.K36]+[.K51]" office:value-type="float" office:value="15841.6034338564" calcext:value-type="float">
            <text:p>15842</text:p>
          </table:table-cell>
          <table:table-cell table:style-name="ce218" table:formula="of:=+[.L21]+[.L36]+[.L51]" office:value-type="float" office:value="15876.3186693961" calcext:value-type="float">
            <text:p>15876</text:p>
          </table:table-cell>
          <table:table-cell table:style-name="ce218" table:formula="of:=+[.M21]+[.M36]+[.M51]" office:value-type="float" office:value="17338.3681717706" calcext:value-type="float">
            <text:p>17338</text:p>
          </table:table-cell>
          <table:table-cell table:style-name="ce218" table:formula="of:=+[.N21]+[.N36]+[.N51]" office:value-type="float" office:value="27772.1884318039" calcext:value-type="float">
            <text:p>27772</text:p>
          </table:table-cell>
          <table:table-cell table:style-name="ce225" table:formula="of:=SUM([.C66:.N66])" office:value-type="float" office:value="207145.810465718" calcext:value-type="float">
            <text:p>207146</text:p>
          </table:table-cell>
          <table:table-cell table:style-name="ce231"/>
          <table:table-cell table:style-name="ce206" office:value-type="float" office:value="9" calcext:value-type="float">
            <text:p>9</text:p>
          </table:table-cell>
          <table:table-cell table:style-name="ce218" table:formula="of:=+[.R21]+[.R36]+[.R51]" office:value-type="float" office:value="161752.66956106" calcext:value-type="float">
            <text:p>161753</text:p>
          </table:table-cell>
          <table:table-cell table:style-name="ce218" table:formula="of:=+[.S21]+[.S36]+[.S51]" office:value-type="float" office:value="163294.382521825" calcext:value-type="float">
            <text:p>163294</text:p>
          </table:table-cell>
          <table:table-cell table:style-name="ce218" table:formula="of:=+[.T21]+[.T36]+[.T51]" office:value-type="float" office:value="165606.951962973" calcext:value-type="float">
            <text:p>165607</text:p>
          </table:table-cell>
          <table:table-cell table:style-name="ce218" table:formula="of:=+[.U21]+[.U36]+[.U51]" office:value-type="float" office:value="165670.547622604" calcext:value-type="float">
            <text:p>165671</text:p>
          </table:table-cell>
          <table:table-cell table:style-name="ce218" table:formula="of:=+[.V21]+[.V36]+[.V51]" office:value-type="float" office:value="163370.697313383" calcext:value-type="float">
            <text:p>163371</text:p>
          </table:table-cell>
          <table:table-cell table:style-name="ce218" table:formula="of:=+[.W21]+[.W36]+[.W51]" office:value-type="float" office:value="160666.340066081" calcext:value-type="float">
            <text:p>160666</text:p>
          </table:table-cell>
          <table:table-cell table:style-name="ce218" table:formula="of:=+[.X21]+[.X36]+[.X51]" office:value-type="float" office:value="292925.462545347" calcext:value-type="float">
            <text:p>292925</text:p>
          </table:table-cell>
          <table:table-cell table:style-name="ce218" table:formula="of:=+[.Y21]+[.Y36]+[.Y51]" office:value-type="float" office:value="173569.899405324" calcext:value-type="float">
            <text:p>173570</text:p>
          </table:table-cell>
          <table:table-cell table:style-name="ce218" table:formula="of:=+[.Z21]+[.Z36]+[.Z51]" office:value-type="float" office:value="175882.468846471" calcext:value-type="float">
            <text:p>175882</text:p>
          </table:table-cell>
          <table:table-cell table:style-name="ce218" table:formula="of:=+[.AA21]+[.AA36]+[.AA51]" office:value-type="float" office:value="176267.897086663" calcext:value-type="float">
            <text:p>176268</text:p>
          </table:table-cell>
          <table:table-cell table:style-name="ce218" table:formula="of:=+[.AB21]+[.AB36]+[.AB51]" office:value-type="float" office:value="192500.400136437" calcext:value-type="float">
            <text:p>192500</text:p>
          </table:table-cell>
          <table:table-cell table:style-name="ce218" table:formula="of:=+[.AC21]+[.AC36]+[.AC51]" office:value-type="float" office:value="308342.592152997" calcext:value-type="float">
            <text:p>308343</text:p>
          </table:table-cell>
          <table:table-cell table:style-name="ce225" table:formula="of:=SUM([.R66:.AC66])" office:value-type="float" office:value="2299850.30922117" calcext:value-type="float">
            <text:p>2299850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10" calcext:value-type="float">
            <text:p>10</text:p>
          </table:table-cell>
          <table:table-cell table:style-name="ce218" table:formula="of:=+[.C22]+[.C37]+[.C52]" office:value-type="float" office:value="15588.7689018968" calcext:value-type="float">
            <text:p>15589</text:p>
          </table:table-cell>
          <table:table-cell table:style-name="ce218" table:formula="of:=+[.D22]+[.D37]+[.D52]" office:value-type="float" office:value="15737.3501100069" calcext:value-type="float">
            <text:p>15737</text:p>
          </table:table-cell>
          <table:table-cell table:style-name="ce218" table:formula="of:=+[.E22]+[.E37]+[.E52]" office:value-type="float" office:value="15960.2219221721" calcext:value-type="float">
            <text:p>15960</text:p>
          </table:table-cell>
          <table:table-cell table:style-name="ce218" table:formula="of:=+[.F22]+[.F37]+[.F52]" office:value-type="float" office:value="15966.3508970067" calcext:value-type="float">
            <text:p>15966</text:p>
          </table:table-cell>
          <table:table-cell table:style-name="ce218" table:formula="of:=+[.G22]+[.G37]+[.G52]" office:value-type="float" office:value="15744.7048798084" calcext:value-type="float">
            <text:p>15745</text:p>
          </table:table-cell>
          <table:table-cell table:style-name="ce218" table:formula="of:=+[.H22]+[.H37]+[.H52]" office:value-type="float" office:value="15484.0748681322" calcext:value-type="float">
            <text:p>15484</text:p>
          </table:table-cell>
          <table:table-cell table:style-name="ce218" table:formula="of:=+[.I22]+[.I37]+[.I52]" office:value-type="float" office:value="28230.4295409287" calcext:value-type="float">
            <text:p>28230</text:p>
          </table:table-cell>
          <table:table-cell table:style-name="ce218" table:formula="of:=+[.J22]+[.J37]+[.J52]" office:value-type="float" office:value="16727.6438620611" calcext:value-type="float">
            <text:p>16728</text:p>
          </table:table-cell>
          <table:table-cell table:style-name="ce218" table:formula="of:=+[.K22]+[.K37]+[.K52]" office:value-type="float" office:value="16950.5156742263" calcext:value-type="float">
            <text:p>16951</text:p>
          </table:table-cell>
          <table:table-cell table:style-name="ce218" table:formula="of:=+[.L22]+[.L37]+[.L52]" office:value-type="float" office:value="16987.6609762538" calcext:value-type="float">
            <text:p>16988</text:p>
          </table:table-cell>
          <table:table-cell table:style-name="ce218" table:formula="of:=+[.M22]+[.M37]+[.M52]" office:value-type="float" office:value="18552.0539437946" calcext:value-type="float">
            <text:p>18552</text:p>
          </table:table-cell>
          <table:table-cell table:style-name="ce218" table:formula="of:=+[.N22]+[.N37]+[.N52]" office:value-type="float" office:value="29716.2416220302" calcext:value-type="float">
            <text:p>29716</text:p>
          </table:table-cell>
          <table:table-cell table:style-name="ce225" table:formula="of:=SUM([.C67:.N67])" office:value-type="float" office:value="221646.017198318" calcext:value-type="float">
            <text:p>221646</text:p>
          </table:table-cell>
          <table:table-cell table:style-name="ce231"/>
          <table:table-cell table:style-name="ce206" office:value-type="float" office:value="10" calcext:value-type="float">
            <text:p>10</text:p>
          </table:table-cell>
          <table:table-cell table:style-name="ce218" table:formula="of:=+[.R22]+[.R37]+[.R52]" office:value-type="float" office:value="173075.356430335" calcext:value-type="float">
            <text:p>173075</text:p>
          </table:table-cell>
          <table:table-cell table:style-name="ce218" table:formula="of:=+[.S22]+[.S37]+[.S52]" office:value-type="float" office:value="174724.989298353" calcext:value-type="float">
            <text:p>174725</text:p>
          </table:table-cell>
          <table:table-cell table:style-name="ce218" table:formula="of:=+[.T22]+[.T37]+[.T52]" office:value-type="float" office:value="177199.438600381" calcext:value-type="float">
            <text:p>177199</text:p>
          </table:table-cell>
          <table:table-cell table:style-name="ce218" table:formula="of:=+[.U22]+[.U37]+[.U52]" office:value-type="float" office:value="177267.485956187" calcext:value-type="float">
            <text:p>177267</text:p>
          </table:table-cell>
          <table:table-cell table:style-name="ce218" table:formula="of:=+[.V22]+[.V37]+[.V52]" office:value-type="float" office:value="174806.64612532" calcext:value-type="float">
            <text:p>174807</text:p>
          </table:table-cell>
          <table:table-cell table:style-name="ce218" table:formula="of:=+[.W22]+[.W37]+[.W52]" office:value-type="float" office:value="171912.983870707" calcext:value-type="float">
            <text:p>171913</text:p>
          </table:table-cell>
          <table:table-cell table:style-name="ce218" table:formula="of:=+[.X22]+[.X37]+[.X52]" office:value-type="float" office:value="313430.244923522" calcext:value-type="float">
            <text:p>313430</text:p>
          </table:table-cell>
          <table:table-cell table:style-name="ce218" table:formula="of:=+[.Y22]+[.Y37]+[.Y52]" office:value-type="float" office:value="185719.792363697" calcext:value-type="float">
            <text:p>185720</text:p>
          </table:table-cell>
          <table:table-cell table:style-name="ce218" table:formula="of:=+[.Z22]+[.Z37]+[.Z52]" office:value-type="float" office:value="188194.241665724" calcext:value-type="float">
            <text:p>188194</text:p>
          </table:table-cell>
          <table:table-cell table:style-name="ce218" table:formula="of:=+[.AA22]+[.AA37]+[.AA52]" office:value-type="float" office:value="188606.649882729" calcext:value-type="float">
            <text:p>188607</text:p>
          </table:table-cell>
          <table:table-cell table:style-name="ce218" table:formula="of:=+[.AB22]+[.AB37]+[.AB52]" office:value-type="float" office:value="205975.428145987" calcext:value-type="float">
            <text:p>205975</text:p>
          </table:table-cell>
          <table:table-cell table:style-name="ce218" table:formula="of:=+[.AC22]+[.AC37]+[.AC52]" office:value-type="float" office:value="329926.573603707" calcext:value-type="float">
            <text:p>329927</text:p>
          </table:table-cell>
          <table:table-cell table:style-name="ce225" table:formula="of:=SUM([.R67:.AC67])" office:value-type="float" office:value="2460839.83086665" calcext:value-type="float">
            <text:p>2460840</text:p>
          </table:table-cell>
          <table:table-cell table:number-columns-repeated="16354"/>
        </table:table-row>
        <table:table-row table:style-name="ro8" table:number-rows-repeated="2">
          <table:table-cell table:number-columns-repeated="16384"/>
        </table:table-row>
        <table:table-row table:style-name="ro8">
          <table:table-cell table:number-columns-repeated="17"/>
          <table:table-cell table:style-name="ce207" office:value-type="string" calcext:value-type="string" table:number-columns-spanned="12" table:number-rows-spanned="1">
            <text:p>VENTAS TOTALES ANUALES EN SOLES DE COMBUSTIBLES</text:p>
          </table:table-cell>
          <table:covered-table-cell table:number-columns-repeated="11" table:style-name="ce215"/>
          <table:table-cell table:number-columns-repeated="16355"/>
        </table:table-row>
        <table:table-row table:style-name="ro8">
          <table:table-cell table:number-columns-repeated="2"/>
          <table:table-cell table:style-name="ce207" office:value-type="string" calcext:value-type="string" table:number-columns-spanned="12" table:number-rows-spanned="1">
            <text:p>CONSOLIDADO DE VENTAS ANUALES EN GALONES DE COMBUSTIBLES</text:p>
          </table:table-cell>
          <table:covered-table-cell table:number-columns-repeated="11" table:style-name="ce215"/>
          <table:table-cell table:number-columns-repeated="16370"/>
        </table:table-row>
        <table:table-row table:style-name="ro8">
          <table:table-cell table:number-columns-repeated="17"/>
          <table:table-cell table:style-name="ce212" office:value-type="string" calcext:value-type="string">
            <text:p>Producto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3" calcext:value-type="float">
            <text:p>3</text:p>
          </table:table-cell>
          <table:table-cell table:style-name="ce212" office:value-type="float" office:value="4" calcext:value-type="float">
            <text:p>4</text:p>
          </table:table-cell>
          <table:table-cell table:style-name="ce212" office:value-type="float" office:value="5" calcext:value-type="float">
            <text:p>5</text:p>
          </table:table-cell>
          <table:table-cell table:style-name="ce212" office:value-type="float" office:value="6" calcext:value-type="float">
            <text:p>6</text:p>
          </table:table-cell>
          <table:table-cell table:style-name="ce212" office:value-type="float" office:value="7" calcext:value-type="float">
            <text:p>7</text:p>
          </table:table-cell>
          <table:table-cell table:style-name="ce212" office:value-type="float" office:value="8" calcext:value-type="float">
            <text:p>8</text:p>
          </table:table-cell>
          <table:table-cell table:style-name="ce212" office:value-type="float" office:value="9" calcext:value-type="float">
            <text:p>9</text:p>
          </table:table-cell>
          <table:table-cell table:style-name="ce212" office:value-type="float" office:value="10" calcext:value-type="float">
            <text:p>10</text:p>
          </table:table-cell>
          <table:table-cell table:style-name="ce223" office:value-type="string" calcext:value-type="string">
            <text:p>TOTALES</text:p>
          </table:table-cell>
          <table:table-cell table:number-columns-repeated="16355"/>
        </table:table-row>
        <table:table-row table:style-name="ro8">
          <table:table-cell table:number-columns-repeated="2"/>
          <table:table-cell table:style-name="ce212" office:value-type="string" calcext:value-type="string">
            <text:p>Producto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3" calcext:value-type="float">
            <text:p>3</text:p>
          </table:table-cell>
          <table:table-cell table:style-name="ce212" office:value-type="float" office:value="4" calcext:value-type="float">
            <text:p>4</text:p>
          </table:table-cell>
          <table:table-cell table:style-name="ce212" office:value-type="float" office:value="5" calcext:value-type="float">
            <text:p>5</text:p>
          </table:table-cell>
          <table:table-cell table:style-name="ce212" office:value-type="float" office:value="6" calcext:value-type="float">
            <text:p>6</text:p>
          </table:table-cell>
          <table:table-cell table:style-name="ce212" office:value-type="float" office:value="7" calcext:value-type="float">
            <text:p>7</text:p>
          </table:table-cell>
          <table:table-cell table:style-name="ce212" office:value-type="float" office:value="8" calcext:value-type="float">
            <text:p>8</text:p>
          </table:table-cell>
          <table:table-cell table:style-name="ce212" office:value-type="float" office:value="9" calcext:value-type="float">
            <text:p>9</text:p>
          </table:table-cell>
          <table:table-cell table:style-name="ce212" office:value-type="float" office:value="10" calcext:value-type="float">
            <text:p>10</text:p>
          </table:table-cell>
          <table:table-cell table:style-name="ce212" office:value-type="string" calcext:value-type="string">
            <text:p>total</text:p>
          </table:table-cell>
          <table:table-cell table:number-columns-repeated="3"/>
          <table:table-cell table:style-name="ce206" office:value-type="string" calcext:value-type="string">
            <text:p>DB5</text:p>
          </table:table-cell>
          <table:table-cell table:style-name="ce218" table:formula="of:=+[.D74]*[$Resumen.$C$4]" office:value-type="float" office:value="660508.474576271" calcext:value-type="float">
            <text:p>660508</text:p>
          </table:table-cell>
          <table:table-cell table:style-name="ce218" table:formula="of:=+[.E74]*[$Resumen.$C$4]" office:value-type="float" office:value="715550.847457627" calcext:value-type="float">
            <text:p>715551</text:p>
          </table:table-cell>
          <table:table-cell table:style-name="ce218" table:formula="of:=+[.F74]*[$Resumen.$C$4]" office:value-type="float" office:value="765639.406779661" calcext:value-type="float">
            <text:p>765639</text:p>
          </table:table-cell>
          <table:table-cell table:style-name="ce218" table:formula="of:=+[.G74]*[$Resumen.$C$4]" office:value-type="float" office:value="819234.165254237" calcext:value-type="float">
            <text:p>819234</text:p>
          </table:table-cell>
          <table:table-cell table:style-name="ce218" table:formula="of:=+[.H74]*[$Resumen.$C$4]" office:value-type="float" office:value="876580.556822034" calcext:value-type="float">
            <text:p>876581</text:p>
          </table:table-cell>
          <table:table-cell table:style-name="ce218" table:formula="of:=+[.I74]*[$Resumen.$C$4]" office:value-type="float" office:value="937941.195799576" calcext:value-type="float">
            <text:p>937941</text:p>
          </table:table-cell>
          <table:table-cell table:style-name="ce218" table:formula="of:=+[.J74]*[$Resumen.$C$4]" office:value-type="float" office:value="1003597.07950555" calcext:value-type="float">
            <text:p>1003597</text:p>
          </table:table-cell>
          <table:table-cell table:style-name="ce218" table:formula="of:=+[.K74]*[$Resumen.$C$4]" office:value-type="float" office:value="1073848.87507094" calcext:value-type="float">
            <text:p>1073849</text:p>
          </table:table-cell>
          <table:table-cell table:style-name="ce218" table:formula="of:=+[.L74]*[$Resumen.$C$4]" office:value-type="float" office:value="1149018.2963259" calcext:value-type="float">
            <text:p>1149018</text:p>
          </table:table-cell>
          <table:table-cell table:style-name="ce218" table:formula="of:=+[.M74]*[$Resumen.$C$4]" office:value-type="float" office:value="1229449.57706871" calcext:value-type="float">
            <text:p>1229450</text:p>
          </table:table-cell>
          <table:table-cell table:style-name="ce225" table:formula="of:=SUM([.S73:.AB73])" office:value-type="float" office:value="9231368.47466051" calcext:value-type="float">
            <text:p>9231368</text:p>
          </table:table-cell>
          <table:table-cell table:number-columns-repeated="16355"/>
        </table:table-row>
        <table:table-row table:style-name="ro8">
          <table:table-cell table:number-columns-repeated="2"/>
          <table:table-cell table:style-name="ce206" office:value-type="string" calcext:value-type="string">
            <text:p>DB5</text:p>
          </table:table-cell>
          <table:table-cell table:style-name="ce218" table:formula="of:=+[.O13]" office:value-type="float" office:value="60000" calcext:value-type="float">
            <text:p>60000</text:p>
          </table:table-cell>
          <table:table-cell table:style-name="ce218" table:formula="of:=+[.O14]" office:value-type="float" office:value="65000" calcext:value-type="float">
            <text:p>65000</text:p>
          </table:table-cell>
          <table:table-cell table:style-name="ce218" table:formula="of:=+[.O15]" office:value-type="float" office:value="69550" calcext:value-type="float">
            <text:p>69550</text:p>
          </table:table-cell>
          <table:table-cell table:style-name="ce218" table:formula="of:=+[.O16]" office:value-type="float" office:value="74418.5" calcext:value-type="float">
            <text:p>74419</text:p>
          </table:table-cell>
          <table:table-cell table:style-name="ce218" table:formula="of:=+[.O17]" office:value-type="float" office:value="79627.795" calcext:value-type="float">
            <text:p>79628</text:p>
          </table:table-cell>
          <table:table-cell table:style-name="ce218" table:formula="of:=+[.O18]" office:value-type="float" office:value="85201.74065" calcext:value-type="float">
            <text:p>85202</text:p>
          </table:table-cell>
          <table:table-cell table:style-name="ce218" table:formula="of:=+[.O19]" office:value-type="float" office:value="91165.8624955" calcext:value-type="float">
            <text:p>91166</text:p>
          </table:table-cell>
          <table:table-cell table:style-name="ce218" table:formula="of:=+[.O20]" office:value-type="float" office:value="97547.472870185" calcext:value-type="float">
            <text:p>97547</text:p>
          </table:table-cell>
          <table:table-cell table:style-name="ce218" table:formula="of:=+[.O21]" office:value-type="float" office:value="104375.795971098" calcext:value-type="float">
            <text:p>104376</text:p>
          </table:table-cell>
          <table:table-cell table:style-name="ce218" table:formula="of:=+[.O22]" office:value-type="float" office:value="111682.101689075" calcext:value-type="float">
            <text:p>111682</text:p>
          </table:table-cell>
          <table:table-cell table:style-name="ce225" table:formula="of:=SUM([.D74:.M74])" office:value-type="float" office:value="838569.268675858" calcext:value-type="float">
            <text:p>838569</text:p>
          </table:table-cell>
          <table:table-cell table:number-columns-repeated="3"/>
          <table:table-cell table:style-name="ce206" office:value-type="string" calcext:value-type="string">
            <text:p>G90</text:p>
          </table:table-cell>
          <table:table-cell table:style-name="ce218" table:formula="of:=+[.D75]*[$Resumen.$C$5]" office:value-type="float" office:value="497059.322033898" calcext:value-type="float">
            <text:p>497059</text:p>
          </table:table-cell>
          <table:table-cell table:style-name="ce218" table:formula="of:=+[.E75]*[$Resumen.$C$5]" office:value-type="float" office:value="574379.661016949" calcext:value-type="float">
            <text:p>574380</text:p>
          </table:table-cell>
          <table:table-cell table:style-name="ce218" table:formula="of:=+[.F75]*[$Resumen.$C$5]" office:value-type="float" office:value="614586.237288136" calcext:value-type="float">
            <text:p>614586</text:p>
          </table:table-cell>
          <table:table-cell table:style-name="ce218" table:formula="of:=+[.G75]*[$Resumen.$C$5]" office:value-type="float" office:value="657607.273898305" calcext:value-type="float">
            <text:p>657607</text:p>
          </table:table-cell>
          <table:table-cell table:style-name="ce218" table:formula="of:=+[.H75]*[$Resumen.$C$5]" office:value-type="float" office:value="703639.783071187" calcext:value-type="float">
            <text:p>703640</text:p>
          </table:table-cell>
          <table:table-cell table:style-name="ce218" table:formula="of:=+[.I75]*[$Resumen.$C$5]" office:value-type="float" office:value="752894.56788617" calcext:value-type="float">
            <text:p>752895</text:p>
          </table:table-cell>
          <table:table-cell table:style-name="ce218" table:formula="of:=+[.J75]*[$Resumen.$C$5]" office:value-type="float" office:value="805597.187638202" calcext:value-type="float">
            <text:p>805597</text:p>
          </table:table-cell>
          <table:table-cell table:style-name="ce218" table:formula="of:=+[.K75]*[$Resumen.$C$5]" office:value-type="float" office:value="861988.990772876" calcext:value-type="float">
            <text:p>861989</text:p>
          </table:table-cell>
          <table:table-cell table:style-name="ce218" table:formula="of:=+[.L75]*[$Resumen.$C$5]" office:value-type="float" office:value="922328.220126977" calcext:value-type="float">
            <text:p>922328</text:p>
          </table:table-cell>
          <table:table-cell table:style-name="ce218" table:formula="of:=+[.M75]*[$Resumen.$C$5]" office:value-type="float" office:value="986891.195535866" calcext:value-type="float">
            <text:p>986891</text:p>
          </table:table-cell>
          <table:table-cell table:style-name="ce225" table:formula="of:=SUM([.S74:.AB74])" office:value-type="float" office:value="7376972.43926857" calcext:value-type="float">
            <text:p>7376972</text:p>
          </table:table-cell>
          <table:table-cell table:number-columns-repeated="16355"/>
        </table:table-row>
        <table:table-row table:style-name="ro8">
          <table:table-cell table:number-columns-repeated="2"/>
          <table:table-cell table:style-name="ce206" office:value-type="string" calcext:value-type="string">
            <text:p>G90</text:p>
          </table:table-cell>
          <table:table-cell table:style-name="ce218" table:formula="of:=+[.O28]" office:value-type="float" office:value="45000" calcext:value-type="float">
            <text:p>45000</text:p>
          </table:table-cell>
          <table:table-cell table:style-name="ce218" table:formula="of:=+[.O29]" office:value-type="float" office:value="52000" calcext:value-type="float">
            <text:p>52000</text:p>
          </table:table-cell>
          <table:table-cell table:style-name="ce218" table:formula="of:=+[.O30]" office:value-type="float" office:value="55640" calcext:value-type="float">
            <text:p>55640</text:p>
          </table:table-cell>
          <table:table-cell table:style-name="ce218" table:formula="of:=+[.O31]" office:value-type="float" office:value="59534.8" calcext:value-type="float">
            <text:p>59535</text:p>
          </table:table-cell>
          <table:table-cell table:style-name="ce218" table:formula="of:=+[.O32]" office:value-type="float" office:value="63702.236" calcext:value-type="float">
            <text:p>63702</text:p>
          </table:table-cell>
          <table:table-cell table:style-name="ce218" table:formula="of:=+[.O33]" office:value-type="float" office:value="68161.39252" calcext:value-type="float">
            <text:p>68161</text:p>
          </table:table-cell>
          <table:table-cell table:style-name="ce218" table:formula="of:=+[.O34]" office:value-type="float" office:value="72932.6899964" calcext:value-type="float">
            <text:p>72933</text:p>
          </table:table-cell>
          <table:table-cell table:style-name="ce218" table:formula="of:=+[.O35]" office:value-type="float" office:value="78037.978296148" calcext:value-type="float">
            <text:p>78038</text:p>
          </table:table-cell>
          <table:table-cell table:style-name="ce218" table:formula="of:=+[.O36]" office:value-type="float" office:value="83500.6367768784" calcext:value-type="float">
            <text:p>83501</text:p>
          </table:table-cell>
          <table:table-cell table:style-name="ce218" table:formula="of:=+[.O37]" office:value-type="float" office:value="89345.6813512599" calcext:value-type="float">
            <text:p>89346</text:p>
          </table:table-cell>
          <table:table-cell table:style-name="ce225" table:formula="of:=SUM([.D75:.M75])" office:value-type="float" office:value="667855.414940686" calcext:value-type="float">
            <text:p>667855</text:p>
          </table:table-cell>
          <table:table-cell table:number-columns-repeated="3"/>
          <table:table-cell table:style-name="ce206" office:value-type="string" calcext:value-type="string">
            <text:p>G95</text:p>
          </table:table-cell>
          <table:table-cell table:style-name="ce218" table:formula="of:=+[.D76]*[$Resumen.$C$6]" office:value-type="float" office:value="130442.288135593" calcext:value-type="float">
            <text:p>130442</text:p>
          </table:table-cell>
          <table:table-cell table:style-name="ce218" table:formula="of:=+[.E76]*[$Resumen.$C$6]" office:value-type="float" office:value="142300.677966102" calcext:value-type="float">
            <text:p>142301</text:p>
          </table:table-cell>
          <table:table-cell table:style-name="ce218" table:formula="of:=+[.F76]*[$Resumen.$C$6]" office:value-type="float" office:value="152261.725423729" calcext:value-type="float">
            <text:p>152262</text:p>
          </table:table-cell>
          <table:table-cell table:style-name="ce218" table:formula="of:=+[.G76]*[$Resumen.$C$6]" office:value-type="float" office:value="162920.04620339" calcext:value-type="float">
            <text:p>162920</text:p>
          </table:table-cell>
          <table:table-cell table:style-name="ce218" table:formula="of:=+[.H76]*[$Resumen.$C$6]" office:value-type="float" office:value="174324.449437627" calcext:value-type="float">
            <text:p>174324</text:p>
          </table:table-cell>
          <table:table-cell table:style-name="ce218" table:formula="of:=+[.I76]*[$Resumen.$C$6]" office:value-type="float" office:value="186527.160898261" calcext:value-type="float">
            <text:p>186527</text:p>
          </table:table-cell>
          <table:table-cell table:style-name="ce218" table:formula="of:=+[.J76]*[$Resumen.$C$6]" office:value-type="float" office:value="199584.062161139" calcext:value-type="float">
            <text:p>199584</text:p>
          </table:table-cell>
          <table:table-cell table:style-name="ce218" table:formula="of:=+[.K76]*[$Resumen.$C$6]" office:value-type="float" office:value="213554.946512419" calcext:value-type="float">
            <text:p>213555</text:p>
          </table:table-cell>
          <table:table-cell table:style-name="ce218" table:formula="of:=+[.L76]*[$Resumen.$C$6]" office:value-type="float" office:value="228503.792768288" calcext:value-type="float">
            <text:p>228504</text:p>
          </table:table-cell>
          <table:table-cell table:style-name="ce218" table:formula="of:=+[.M76]*[$Resumen.$C$6]" office:value-type="float" office:value="244499.058262069" calcext:value-type="float">
            <text:p>244499</text:p>
          </table:table-cell>
          <table:table-cell table:style-name="ce225" table:formula="of:=SUM([.S75:.AB75])" office:value-type="float" office:value="1834918.20776862" calcext:value-type="float">
            <text:p>1834918</text:p>
          </table:table-cell>
          <table:table-cell table:number-columns-repeated="16355"/>
        </table:table-row>
        <table:table-row table:style-name="ro8">
          <table:table-cell table:number-columns-repeated="2"/>
          <table:table-cell table:style-name="ce206" office:value-type="string" calcext:value-type="string">
            <text:p>G95</text:p>
          </table:table-cell>
          <table:table-cell table:style-name="ce218" table:formula="of:=+[.O43]" office:value-type="float" office:value="11000" calcext:value-type="float">
            <text:p>11000</text:p>
          </table:table-cell>
          <table:table-cell table:style-name="ce218" table:formula="of:=+[.O44]" office:value-type="float" office:value="12000" calcext:value-type="float">
            <text:p>12000</text:p>
          </table:table-cell>
          <table:table-cell table:style-name="ce218" table:formula="of:=+[.O45]" office:value-type="float" office:value="12840" calcext:value-type="float">
            <text:p>12840</text:p>
          </table:table-cell>
          <table:table-cell table:style-name="ce218" table:formula="of:=+[.O46]" office:value-type="float" office:value="13738.8" calcext:value-type="float">
            <text:p>13739</text:p>
          </table:table-cell>
          <table:table-cell table:style-name="ce218" table:formula="of:=+[.O47]" office:value-type="float" office:value="14700.516" calcext:value-type="float">
            <text:p>14701</text:p>
          </table:table-cell>
          <table:table-cell table:style-name="ce218" table:formula="of:=+[.O48]" office:value-type="float" office:value="15729.55212" calcext:value-type="float">
            <text:p>15730</text:p>
          </table:table-cell>
          <table:table-cell table:style-name="ce218" table:formula="of:=+[.O49]" office:value-type="float" office:value="16830.6207684" calcext:value-type="float">
            <text:p>16831</text:p>
          </table:table-cell>
          <table:table-cell table:style-name="ce218" table:formula="of:=+[.O50]" office:value-type="float" office:value="18008.764222188" calcext:value-type="float">
            <text:p>18009</text:p>
          </table:table-cell>
          <table:table-cell table:style-name="ce218" table:formula="of:=+[.O51]" office:value-type="float" office:value="19269.3777177412" calcext:value-type="float">
            <text:p>19269</text:p>
          </table:table-cell>
          <table:table-cell table:style-name="ce218" table:formula="of:=+[.O52]" office:value-type="float" office:value="20618.234157983" calcext:value-type="float">
            <text:p>20618</text:p>
          </table:table-cell>
          <table:table-cell table:style-name="ce225" table:formula="of:=SUM([.D76:.M76])" office:value-type="float" office:value="154735.864986312" calcext:value-type="float">
            <text:p>154736</text:p>
          </table:table-cell>
          <table:table-cell table:number-columns-repeated="3"/>
          <table:table-cell table:style-name="ce223" office:value-type="string" calcext:value-type="string">
            <text:p>Total</text:p>
          </table:table-cell>
          <table:table-cell table:style-name="ce224" table:formula="of:=SUM([.S72:.S75])" office:value-type="float" office:value="1288011.08474576" calcext:value-type="float">
            <text:p>1288011.08474576</text:p>
          </table:table-cell>
          <table:table-cell table:style-name="ce224" table:formula="of:=SUM([.T72:.T75])" office:value-type="float" office:value="1432233.18644068" calcext:value-type="float">
            <text:p>1432233.18644068</text:p>
          </table:table-cell>
          <table:table-cell table:style-name="ce224" table:formula="of:=SUM([.U72:.U75])" office:value-type="float" office:value="1532490.36949153" calcext:value-type="float">
            <text:p>1532490.36949153</text:p>
          </table:table-cell>
          <table:table-cell table:style-name="ce224" table:formula="of:=SUM([.V72:.V75])" office:value-type="float" office:value="1639765.48535593" calcext:value-type="float">
            <text:p>1639765.48535593</text:p>
          </table:table-cell>
          <table:table-cell table:style-name="ce224" table:formula="of:=SUM([.W72:.W75])" office:value-type="float" office:value="1754549.78933085" calcext:value-type="float">
            <text:p>1754549.78933085</text:p>
          </table:table-cell>
          <table:table-cell table:style-name="ce224" table:formula="of:=SUM([.X72:.X75])" office:value-type="float" office:value="1877368.92458401" calcext:value-type="float">
            <text:p>1877368.92458401</text:p>
          </table:table-cell>
          <table:table-cell table:style-name="ce224" table:formula="of:=SUM([.Y72:.Y75])" office:value-type="float" office:value="2008785.32930489" calcext:value-type="float">
            <text:p>2008785.32930489</text:p>
          </table:table-cell>
          <table:table-cell table:style-name="ce224" table:formula="of:=SUM([.Z72:.Z75])" office:value-type="float" office:value="2149400.81235623" calcext:value-type="float">
            <text:p>2149400.81235623</text:p>
          </table:table-cell>
          <table:table-cell table:style-name="ce224" table:formula="of:=SUM([.AA72:.AA75])" office:value-type="float" office:value="2299859.30922117" calcext:value-type="float">
            <text:p>2299859.30922117</text:p>
          </table:table-cell>
          <table:table-cell table:style-name="ce224" table:formula="of:=SUM([.AB72:.AB75])" office:value-type="float" office:value="2460849.83086665" calcext:value-type="float">
            <text:p>2460849.83086665</text:p>
          </table:table-cell>
          <table:table-cell table:style-name="ce224" table:formula="of:=SUM([.AC72:.AC75])" office:value-type="float" office:value="18443259.1216977" calcext:value-type="float">
            <text:p>18443259.1216977</text:p>
          </table:table-cell>
          <table:table-cell table:number-columns-repeated="16355"/>
        </table:table-row>
        <table:table-row table:style-name="ro8" table:number-rows-repeated="3">
          <table:table-cell table:number-columns-repeated="16384"/>
        </table:table-row>
        <table:table-row table:style-name="ro8">
          <table:table-cell/>
          <table:table-cell table:style-name="ce207" office:value-type="string" calcext:value-type="string" table:number-columns-spanned="14" table:number-rows-spanned="1">
            <text:p>SERVICIO DE VULCANIZADO DE LLANTAS <text:s/>EN UNIDADES</text:p>
          </table:table-cell>
          <table:covered-table-cell table:number-columns-repeated="13" table:style-name="ce215"/>
          <table:table-cell/>
          <table:table-cell table:style-name="ce207" office:value-type="string" calcext:value-type="string" table:number-columns-spanned="14" table:number-rows-spanned="1">
            <text:p>INGRESOS MENSUALES (SOLES) DE VULCANIZADO DE LLANTAS</text:p>
          </table:table-cell>
          <table:covered-table-cell table:number-columns-repeated="13" table:style-name="ce215"/>
          <table:table-cell table:number-columns-repeated="16354"/>
        </table:table-row>
        <table:table-row table:style-name="ro8">
          <table:table-cell table:number-columns-repeated="16384"/>
        </table:table-row>
        <table:table-row table:style-name="ro8">
          <table:table-cell/>
          <table:table-cell table:style-name="ce212" office:value-type="string" calcext:value-type="string">
            <text:p>Año</text:p>
          </table:table-cell>
          <table:table-cell table:style-name="ce212" office:value-type="string" calcext:value-type="string">
            <text:p>Mes 1</text:p>
          </table:table-cell>
          <table:table-cell table:style-name="ce212" office:value-type="string" calcext:value-type="string">
            <text:p>Mes 2</text:p>
          </table:table-cell>
          <table:table-cell table:style-name="ce212" office:value-type="string" calcext:value-type="string">
            <text:p>Mes 3</text:p>
          </table:table-cell>
          <table:table-cell table:style-name="ce212" office:value-type="string" calcext:value-type="string">
            <text:p>Mes 4</text:p>
          </table:table-cell>
          <table:table-cell table:style-name="ce212" office:value-type="string" calcext:value-type="string">
            <text:p>Mes 5</text:p>
          </table:table-cell>
          <table:table-cell table:style-name="ce212" office:value-type="string" calcext:value-type="string">
            <text:p>Mes 6</text:p>
          </table:table-cell>
          <table:table-cell table:style-name="ce212" office:value-type="string" calcext:value-type="string">
            <text:p>Mes 7</text:p>
          </table:table-cell>
          <table:table-cell table:style-name="ce212" office:value-type="string" calcext:value-type="string">
            <text:p>Mes 8</text:p>
          </table:table-cell>
          <table:table-cell table:style-name="ce212" office:value-type="string" calcext:value-type="string">
            <text:p>Mes 9</text:p>
          </table:table-cell>
          <table:table-cell table:style-name="ce212" office:value-type="string" calcext:value-type="string">
            <text:p>Mes 10</text:p>
          </table:table-cell>
          <table:table-cell table:style-name="ce212" office:value-type="string" calcext:value-type="string">
            <text:p>Mes 11</text:p>
          </table:table-cell>
          <table:table-cell table:style-name="ce212" office:value-type="string" calcext:value-type="string">
            <text:p>Mes 12</text:p>
          </table:table-cell>
          <table:table-cell table:style-name="ce212" office:value-type="string" calcext:value-type="string">
            <text:p>TOTAL</text:p>
          </table:table-cell>
          <table:table-cell/>
          <table:table-cell table:style-name="ce212" office:value-type="string" calcext:value-type="string">
            <text:p>Año</text:p>
          </table:table-cell>
          <table:table-cell table:style-name="ce212" office:value-type="string" calcext:value-type="string">
            <text:p>Mes 1</text:p>
          </table:table-cell>
          <table:table-cell table:style-name="ce212" office:value-type="string" calcext:value-type="string">
            <text:p>Mes 2</text:p>
          </table:table-cell>
          <table:table-cell table:style-name="ce212" office:value-type="string" calcext:value-type="string">
            <text:p>Mes 3</text:p>
          </table:table-cell>
          <table:table-cell table:style-name="ce212" office:value-type="string" calcext:value-type="string">
            <text:p>Mes 4</text:p>
          </table:table-cell>
          <table:table-cell table:style-name="ce212" office:value-type="string" calcext:value-type="string">
            <text:p>Mes 5</text:p>
          </table:table-cell>
          <table:table-cell table:style-name="ce212" office:value-type="string" calcext:value-type="string">
            <text:p>Mes 6</text:p>
          </table:table-cell>
          <table:table-cell table:style-name="ce212" office:value-type="string" calcext:value-type="string">
            <text:p>Mes 7</text:p>
          </table:table-cell>
          <table:table-cell table:style-name="ce212" office:value-type="string" calcext:value-type="string">
            <text:p>Mes 8</text:p>
          </table:table-cell>
          <table:table-cell table:style-name="ce212" office:value-type="string" calcext:value-type="string">
            <text:p>Mes 9</text:p>
          </table:table-cell>
          <table:table-cell table:style-name="ce212" office:value-type="string" calcext:value-type="string">
            <text:p>Mes 10</text:p>
          </table:table-cell>
          <table:table-cell table:style-name="ce212" office:value-type="string" calcext:value-type="string">
            <text:p>Mes 11</text:p>
          </table:table-cell>
          <table:table-cell table:style-name="ce212" office:value-type="string" calcext:value-type="string">
            <text:p>Mes 12</text:p>
          </table:table-cell>
          <table:table-cell table:style-name="ce212" office:value-type="string" calcext:value-type="string">
            <text:p>TOTAL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1" calcext:value-type="float">
            <text:p>1</text:p>
          </table:table-cell>
          <table:table-cell table:style-name="ce218" table:formula="of:=+ROUND([.$O$83]*[.C4];0)" office:value-type="float" office:value="50" calcext:value-type="float">
            <text:p>50</text:p>
          </table:table-cell>
          <table:table-cell table:style-name="ce218" table:formula="of:=+ROUND([.$O$83]*[.D4];0)" office:value-type="float" office:value="50" calcext:value-type="float">
            <text:p>50</text:p>
          </table:table-cell>
          <table:table-cell table:style-name="ce218" table:formula="of:=+ROUND([.$O$83]*[.E4];0)" office:value-type="float" office:value="51" calcext:value-type="float">
            <text:p>51</text:p>
          </table:table-cell>
          <table:table-cell table:style-name="ce218" table:formula="of:=+ROUND([.$O$83]*[.F4];0)" office:value-type="float" office:value="51" calcext:value-type="float">
            <text:p>51</text:p>
          </table:table-cell>
          <table:table-cell table:style-name="ce218" table:formula="of:=+ROUND([.$O$83]*[.G4];0)" office:value-type="float" office:value="50" calcext:value-type="float">
            <text:p>50</text:p>
          </table:table-cell>
          <table:table-cell table:style-name="ce218" table:formula="of:=+ROUND([.$O$83]*[.H4];0)" office:value-type="float" office:value="49" calcext:value-type="float">
            <text:p>49</text:p>
          </table:table-cell>
          <table:table-cell table:style-name="ce218" table:formula="of:=+ROUND([.$O$83]*[.I4];0)" office:value-type="float" office:value="90" calcext:value-type="float">
            <text:p>90</text:p>
          </table:table-cell>
          <table:table-cell table:style-name="ce218" table:formula="of:=+ROUND([.$O$83]*[.J4];0)" office:value-type="float" office:value="53" calcext:value-type="float">
            <text:p>53</text:p>
          </table:table-cell>
          <table:table-cell table:style-name="ce218" table:formula="of:=+ROUND([.$O$83]*[.K4];0)" office:value-type="float" office:value="54" calcext:value-type="float">
            <text:p>54</text:p>
          </table:table-cell>
          <table:table-cell table:style-name="ce218" table:formula="of:=+ROUND([.$O$83]*[.L4];0)" office:value-type="float" office:value="54" calcext:value-type="float">
            <text:p>54</text:p>
          </table:table-cell>
          <table:table-cell table:style-name="ce218" table:formula="of:=+ROUND([.$O$83]*[.M4];0)" office:value-type="float" office:value="59" calcext:value-type="float">
            <text:p>59</text:p>
          </table:table-cell>
          <table:table-cell table:style-name="ce218" table:formula="of:=+ROUND([.$O$83]*[.N4];0)" office:value-type="float" office:value="95" calcext:value-type="float">
            <text:p>95</text:p>
          </table:table-cell>
          <table:table-cell table:style-name="ce229" office:value-type="float" office:value="706" calcext:value-type="float">
            <text:p>706</text:p>
          </table:table-cell>
          <table:table-cell/>
          <table:table-cell table:style-name="ce206" office:value-type="float" office:value="1" calcext:value-type="float">
            <text:p>1</text:p>
          </table:table-cell>
          <table:table-cell table:style-name="ce218" table:formula="of:=+[.C83]*[$Resumen.$C$14]" office:value-type="float" office:value="750" calcext:value-type="float">
            <text:p>750</text:p>
          </table:table-cell>
          <table:table-cell table:style-name="ce218" table:formula="of:=+[.D83]*[$Resumen.$C$14]" office:value-type="float" office:value="750" calcext:value-type="float">
            <text:p>750</text:p>
          </table:table-cell>
          <table:table-cell table:style-name="ce218" table:formula="of:=+[.E83]*[$Resumen.$C$14]" office:value-type="float" office:value="765" calcext:value-type="float">
            <text:p>765</text:p>
          </table:table-cell>
          <table:table-cell table:style-name="ce218" table:formula="of:=+[.F83]*[$Resumen.$C$14]" office:value-type="float" office:value="765" calcext:value-type="float">
            <text:p>765</text:p>
          </table:table-cell>
          <table:table-cell table:style-name="ce218" table:formula="of:=+[.G83]*[$Resumen.$C$14]" office:value-type="float" office:value="750" calcext:value-type="float">
            <text:p>750</text:p>
          </table:table-cell>
          <table:table-cell table:style-name="ce218" table:formula="of:=+[.H83]*[$Resumen.$C$14]" office:value-type="float" office:value="735" calcext:value-type="float">
            <text:p>735</text:p>
          </table:table-cell>
          <table:table-cell table:style-name="ce218" table:formula="of:=+[.I83]*[$Resumen.$C$14]" office:value-type="float" office:value="1350" calcext:value-type="float">
            <text:p>1350</text:p>
          </table:table-cell>
          <table:table-cell table:style-name="ce218" table:formula="of:=+[.J83]*[$Resumen.$C$14]" office:value-type="float" office:value="795" calcext:value-type="float">
            <text:p>795</text:p>
          </table:table-cell>
          <table:table-cell table:style-name="ce218" table:formula="of:=+[.K83]*[$Resumen.$C$14]" office:value-type="float" office:value="810" calcext:value-type="float">
            <text:p>810</text:p>
          </table:table-cell>
          <table:table-cell table:style-name="ce218" table:formula="of:=+[.L83]*[$Resumen.$C$14]" office:value-type="float" office:value="810" calcext:value-type="float">
            <text:p>810</text:p>
          </table:table-cell>
          <table:table-cell table:style-name="ce218" table:formula="of:=+[.M83]*[$Resumen.$C$14]" office:value-type="float" office:value="885" calcext:value-type="float">
            <text:p>885</text:p>
          </table:table-cell>
          <table:table-cell table:style-name="ce218" table:formula="of:=+[.N83]*[$Resumen.$C$14]" office:value-type="float" office:value="1425" calcext:value-type="float">
            <text:p>1425</text:p>
          </table:table-cell>
          <table:table-cell table:style-name="ce229" table:formula="of:=SUM([.R83:.AC83])" office:value-type="float" office:value="10590" calcext:value-type="float">
            <text:p>10590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2" calcext:value-type="float">
            <text:p>2</text:p>
          </table:table-cell>
          <table:table-cell table:style-name="ce218" table:formula="of:=+ROUND([.$O$84]*[.C4];0)" office:value-type="float" office:value="53" calcext:value-type="float">
            <text:p>53</text:p>
          </table:table-cell>
          <table:table-cell table:style-name="ce218" table:formula="of:=+ROUND([.$O$84]*[.D4];0)" office:value-type="float" office:value="54" calcext:value-type="float">
            <text:p>54</text:p>
          </table:table-cell>
          <table:table-cell table:style-name="ce218" table:formula="of:=+ROUND([.$O$84]*[.E4];0)" office:value-type="float" office:value="54" calcext:value-type="float">
            <text:p>54</text:p>
          </table:table-cell>
          <table:table-cell table:style-name="ce218" table:formula="of:=+ROUND([.$O$84]*[.F4];0)" office:value-type="float" office:value="54" calcext:value-type="float">
            <text:p>54</text:p>
          </table:table-cell>
          <table:table-cell table:style-name="ce218" table:formula="of:=+ROUND([.$O$84]*[.G4];0)" office:value-type="float" office:value="54" calcext:value-type="float">
            <text:p>54</text:p>
          </table:table-cell>
          <table:table-cell table:style-name="ce218" table:formula="of:=+ROUND([.$O$84]*[.H4];0)" office:value-type="float" office:value="53" calcext:value-type="float">
            <text:p>53</text:p>
          </table:table-cell>
          <table:table-cell table:style-name="ce218" table:formula="of:=+ROUND([.$O$84]*[.I4];0)" office:value-type="float" office:value="96" calcext:value-type="float">
            <text:p>96</text:p>
          </table:table-cell>
          <table:table-cell table:style-name="ce218" table:formula="of:=+ROUND([.$O$84]*[.J4];0)" office:value-type="float" office:value="57" calcext:value-type="float">
            <text:p>57</text:p>
          </table:table-cell>
          <table:table-cell table:style-name="ce218" table:formula="of:=+ROUND([.$O$84]*[.K4];0)" office:value-type="float" office:value="58" calcext:value-type="float">
            <text:p>58</text:p>
          </table:table-cell>
          <table:table-cell table:style-name="ce218" table:formula="of:=+ROUND([.$O$84]*[.L4];0)" office:value-type="float" office:value="58" calcext:value-type="float">
            <text:p>58</text:p>
          </table:table-cell>
          <table:table-cell table:style-name="ce218" table:formula="of:=+ROUND([.$O$84]*[.M4];0)" office:value-type="float" office:value="63" calcext:value-type="float">
            <text:p>63</text:p>
          </table:table-cell>
          <table:table-cell table:style-name="ce218" table:formula="of:=+ROUND([.$O$84]*[.N4];0)" office:value-type="float" office:value="101" calcext:value-type="float">
            <text:p>101</text:p>
          </table:table-cell>
          <table:table-cell table:style-name="ce229" table:formula="of:=+ROUND([.O83]*(1+[.$D$6]);0)" office:value-type="float" office:value="755" calcext:value-type="float">
            <text:p>755</text:p>
          </table:table-cell>
          <table:table-cell/>
          <table:table-cell table:style-name="ce206" office:value-type="float" office:value="2" calcext:value-type="float">
            <text:p>2</text:p>
          </table:table-cell>
          <table:table-cell table:style-name="ce218" table:formula="of:=+[.C84]*[$Resumen.$C$14]" office:value-type="float" office:value="795" calcext:value-type="float">
            <text:p>795</text:p>
          </table:table-cell>
          <table:table-cell table:style-name="ce218" table:formula="of:=+[.D84]*[$Resumen.$C$14]" office:value-type="float" office:value="810" calcext:value-type="float">
            <text:p>810</text:p>
          </table:table-cell>
          <table:table-cell table:style-name="ce218" table:formula="of:=+[.E84]*[$Resumen.$C$14]" office:value-type="float" office:value="810" calcext:value-type="float">
            <text:p>810</text:p>
          </table:table-cell>
          <table:table-cell table:style-name="ce218" table:formula="of:=+[.F84]*[$Resumen.$C$14]" office:value-type="float" office:value="810" calcext:value-type="float">
            <text:p>810</text:p>
          </table:table-cell>
          <table:table-cell table:style-name="ce218" table:formula="of:=+[.G84]*[$Resumen.$C$14]" office:value-type="float" office:value="810" calcext:value-type="float">
            <text:p>810</text:p>
          </table:table-cell>
          <table:table-cell table:style-name="ce218" table:formula="of:=+[.H84]*[$Resumen.$C$14]" office:value-type="float" office:value="795" calcext:value-type="float">
            <text:p>795</text:p>
          </table:table-cell>
          <table:table-cell table:style-name="ce218" table:formula="of:=+[.I84]*[$Resumen.$C$14]" office:value-type="float" office:value="1440" calcext:value-type="float">
            <text:p>1440</text:p>
          </table:table-cell>
          <table:table-cell table:style-name="ce218" table:formula="of:=+[.J84]*[$Resumen.$C$14]" office:value-type="float" office:value="855" calcext:value-type="float">
            <text:p>855</text:p>
          </table:table-cell>
          <table:table-cell table:style-name="ce218" table:formula="of:=+[.K84]*[$Resumen.$C$14]" office:value-type="float" office:value="870" calcext:value-type="float">
            <text:p>870</text:p>
          </table:table-cell>
          <table:table-cell table:style-name="ce218" table:formula="of:=+[.L84]*[$Resumen.$C$14]" office:value-type="float" office:value="870" calcext:value-type="float">
            <text:p>870</text:p>
          </table:table-cell>
          <table:table-cell table:style-name="ce218" table:formula="of:=+[.M84]*[$Resumen.$C$14]" office:value-type="float" office:value="945" calcext:value-type="float">
            <text:p>945</text:p>
          </table:table-cell>
          <table:table-cell table:style-name="ce218" table:formula="of:=+[.N84]*[$Resumen.$C$14]" office:value-type="float" office:value="1515" calcext:value-type="float">
            <text:p>1515</text:p>
          </table:table-cell>
          <table:table-cell table:style-name="ce229" table:formula="of:=SUM([.R84:.AC84])" office:value-type="float" office:value="11325" calcext:value-type="float">
            <text:p>11325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3" calcext:value-type="float">
            <text:p>3</text:p>
          </table:table-cell>
          <table:table-cell table:style-name="ce218" table:formula="of:=+ROUND([.$O$85]*[.C4];0)" office:value-type="float" office:value="57" calcext:value-type="float">
            <text:p>57</text:p>
          </table:table-cell>
          <table:table-cell table:style-name="ce218" table:formula="of:=+ROUND([.$O$85]*[.D4];0)" office:value-type="float" office:value="57" calcext:value-type="float">
            <text:p>57</text:p>
          </table:table-cell>
          <table:table-cell table:style-name="ce218" table:formula="of:=+ROUND([.$O$85]*[.E4];0)" office:value-type="float" office:value="58" calcext:value-type="float">
            <text:p>58</text:p>
          </table:table-cell>
          <table:table-cell table:style-name="ce218" table:formula="of:=+ROUND([.$O$85]*[.F4];0)" office:value-type="float" office:value="58" calcext:value-type="float">
            <text:p>58</text:p>
          </table:table-cell>
          <table:table-cell table:style-name="ce218" table:formula="of:=+ROUND([.$O$85]*[.G4];0)" office:value-type="float" office:value="57" calcext:value-type="float">
            <text:p>57</text:p>
          </table:table-cell>
          <table:table-cell table:style-name="ce218" table:formula="of:=+ROUND([.$O$85]*[.H4];0)" office:value-type="float" office:value="56" calcext:value-type="float">
            <text:p>56</text:p>
          </table:table-cell>
          <table:table-cell table:style-name="ce218" table:formula="of:=+ROUND([.$O$85]*[.I4];0)" office:value-type="float" office:value="103" calcext:value-type="float">
            <text:p>103</text:p>
          </table:table-cell>
          <table:table-cell table:style-name="ce218" table:formula="of:=+ROUND([.$O$85]*[.J4];0)" office:value-type="float" office:value="61" calcext:value-type="float">
            <text:p>61</text:p>
          </table:table-cell>
          <table:table-cell table:style-name="ce218" table:formula="of:=+ROUND([.$O$85]*[.K4];0)" office:value-type="float" office:value="62" calcext:value-type="float">
            <text:p>62</text:p>
          </table:table-cell>
          <table:table-cell table:style-name="ce218" table:formula="of:=+ROUND([.$O$85]*[.L4];0)" office:value-type="float" office:value="62" calcext:value-type="float">
            <text:p>62</text:p>
          </table:table-cell>
          <table:table-cell table:style-name="ce218" table:formula="of:=+ROUND([.$O$85]*[.M4];0)" office:value-type="float" office:value="68" calcext:value-type="float">
            <text:p>68</text:p>
          </table:table-cell>
          <table:table-cell table:style-name="ce218" table:formula="of:=+ROUND([.$O$85]*[.N4];0)" office:value-type="float" office:value="108" calcext:value-type="float">
            <text:p>108</text:p>
          </table:table-cell>
          <table:table-cell table:style-name="ce229" table:formula="of:=+ROUND([.O84]*(1+[.$D$6]);0)" office:value-type="float" office:value="808" calcext:value-type="float">
            <text:p>808</text:p>
          </table:table-cell>
          <table:table-cell/>
          <table:table-cell table:style-name="ce206" office:value-type="float" office:value="3" calcext:value-type="float">
            <text:p>3</text:p>
          </table:table-cell>
          <table:table-cell table:style-name="ce218" table:formula="of:=+[.C85]*[$Resumen.$C$14]" office:value-type="float" office:value="855" calcext:value-type="float">
            <text:p>855</text:p>
          </table:table-cell>
          <table:table-cell table:style-name="ce218" table:formula="of:=+[.D85]*[$Resumen.$C$14]" office:value-type="float" office:value="855" calcext:value-type="float">
            <text:p>855</text:p>
          </table:table-cell>
          <table:table-cell table:style-name="ce218" table:formula="of:=+[.E85]*[$Resumen.$C$14]" office:value-type="float" office:value="870" calcext:value-type="float">
            <text:p>870</text:p>
          </table:table-cell>
          <table:table-cell table:style-name="ce218" table:formula="of:=+[.F85]*[$Resumen.$C$14]" office:value-type="float" office:value="870" calcext:value-type="float">
            <text:p>870</text:p>
          </table:table-cell>
          <table:table-cell table:style-name="ce218" table:formula="of:=+[.G85]*[$Resumen.$C$14]" office:value-type="float" office:value="855" calcext:value-type="float">
            <text:p>855</text:p>
          </table:table-cell>
          <table:table-cell table:style-name="ce218" table:formula="of:=+[.H85]*[$Resumen.$C$14]" office:value-type="float" office:value="840" calcext:value-type="float">
            <text:p>840</text:p>
          </table:table-cell>
          <table:table-cell table:style-name="ce218" table:formula="of:=+[.I85]*[$Resumen.$C$14]" office:value-type="float" office:value="1545" calcext:value-type="float">
            <text:p>1545</text:p>
          </table:table-cell>
          <table:table-cell table:style-name="ce218" table:formula="of:=+[.J85]*[$Resumen.$C$14]" office:value-type="float" office:value="915" calcext:value-type="float">
            <text:p>915</text:p>
          </table:table-cell>
          <table:table-cell table:style-name="ce218" table:formula="of:=+[.K85]*[$Resumen.$C$14]" office:value-type="float" office:value="930" calcext:value-type="float">
            <text:p>930</text:p>
          </table:table-cell>
          <table:table-cell table:style-name="ce218" table:formula="of:=+[.L85]*[$Resumen.$C$14]" office:value-type="float" office:value="930" calcext:value-type="float">
            <text:p>930</text:p>
          </table:table-cell>
          <table:table-cell table:style-name="ce218" table:formula="of:=+[.M85]*[$Resumen.$C$14]" office:value-type="float" office:value="1020" calcext:value-type="float">
            <text:p>1020</text:p>
          </table:table-cell>
          <table:table-cell table:style-name="ce218" table:formula="of:=+[.N85]*[$Resumen.$C$14]" office:value-type="float" office:value="1620" calcext:value-type="float">
            <text:p>1620</text:p>
          </table:table-cell>
          <table:table-cell table:style-name="ce229" table:formula="of:=SUM([.R85:.AC85])" office:value-type="float" office:value="12105" calcext:value-type="float">
            <text:p>12105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4" calcext:value-type="float">
            <text:p>4</text:p>
          </table:table-cell>
          <table:table-cell table:style-name="ce218" table:formula="of:=+ROUND([.$O$86]*[.C4];0)" office:value-type="float" office:value="61" calcext:value-type="float">
            <text:p>61</text:p>
          </table:table-cell>
          <table:table-cell table:style-name="ce218" table:formula="of:=+ROUND([.$O$86]*[.D4];0)" office:value-type="float" office:value="61" calcext:value-type="float">
            <text:p>61</text:p>
          </table:table-cell>
          <table:table-cell table:style-name="ce218" table:formula="of:=+ROUND([.$O$86]*[.E4];0)" office:value-type="float" office:value="62" calcext:value-type="float">
            <text:p>62</text:p>
          </table:table-cell>
          <table:table-cell table:style-name="ce218" table:formula="of:=+ROUND([.$O$86]*[.F4];0)" office:value-type="float" office:value="62" calcext:value-type="float">
            <text:p>62</text:p>
          </table:table-cell>
          <table:table-cell table:style-name="ce218" table:formula="of:=+ROUND([.$O$86]*[.G4];0)" office:value-type="float" office:value="61" calcext:value-type="float">
            <text:p>61</text:p>
          </table:table-cell>
          <table:table-cell table:style-name="ce218" table:formula="of:=+ROUND([.$O$86]*[.H4];0)" office:value-type="float" office:value="60" calcext:value-type="float">
            <text:p>60</text:p>
          </table:table-cell>
          <table:table-cell table:style-name="ce218" table:formula="of:=+ROUND([.$O$86]*[.I4];0)" office:value-type="float" office:value="110" calcext:value-type="float">
            <text:p>110</text:p>
          </table:table-cell>
          <table:table-cell table:style-name="ce218" table:formula="of:=+ROUND([.$O$86]*[.J4];0)" office:value-type="float" office:value="65" calcext:value-type="float">
            <text:p>65</text:p>
          </table:table-cell>
          <table:table-cell table:style-name="ce218" table:formula="of:=+ROUND([.$O$86]*[.K4];0)" office:value-type="float" office:value="66" calcext:value-type="float">
            <text:p>66</text:p>
          </table:table-cell>
          <table:table-cell table:style-name="ce218" table:formula="of:=+ROUND([.$O$86]*[.L4];0)" office:value-type="float" office:value="66" calcext:value-type="float">
            <text:p>66</text:p>
          </table:table-cell>
          <table:table-cell table:style-name="ce218" table:formula="of:=+ROUND([.$O$86]*[.M4];0)" office:value-type="float" office:value="72" calcext:value-type="float">
            <text:p>72</text:p>
          </table:table-cell>
          <table:table-cell table:style-name="ce218" table:formula="of:=+ROUND([.$O$86]*[.N4];0)" office:value-type="float" office:value="116" calcext:value-type="float">
            <text:p>116</text:p>
          </table:table-cell>
          <table:table-cell table:style-name="ce229" table:formula="of:=+ROUND([.O85]*(1+[.$D$6]);0)" office:value-type="float" office:value="865" calcext:value-type="float">
            <text:p>865</text:p>
          </table:table-cell>
          <table:table-cell/>
          <table:table-cell table:style-name="ce206" office:value-type="float" office:value="4" calcext:value-type="float">
            <text:p>4</text:p>
          </table:table-cell>
          <table:table-cell table:style-name="ce218" table:formula="of:=+[.C86]*[$Resumen.$C$14]" office:value-type="float" office:value="915" calcext:value-type="float">
            <text:p>915</text:p>
          </table:table-cell>
          <table:table-cell table:style-name="ce218" table:formula="of:=+[.D86]*[$Resumen.$C$14]" office:value-type="float" office:value="915" calcext:value-type="float">
            <text:p>915</text:p>
          </table:table-cell>
          <table:table-cell table:style-name="ce218" table:formula="of:=+[.E86]*[$Resumen.$C$14]" office:value-type="float" office:value="930" calcext:value-type="float">
            <text:p>930</text:p>
          </table:table-cell>
          <table:table-cell table:style-name="ce218" table:formula="of:=+[.F86]*[$Resumen.$C$14]" office:value-type="float" office:value="930" calcext:value-type="float">
            <text:p>930</text:p>
          </table:table-cell>
          <table:table-cell table:style-name="ce218" table:formula="of:=+[.G86]*[$Resumen.$C$14]" office:value-type="float" office:value="915" calcext:value-type="float">
            <text:p>915</text:p>
          </table:table-cell>
          <table:table-cell table:style-name="ce218" table:formula="of:=+[.H86]*[$Resumen.$C$14]" office:value-type="float" office:value="900" calcext:value-type="float">
            <text:p>900</text:p>
          </table:table-cell>
          <table:table-cell table:style-name="ce218" table:formula="of:=+[.I86]*[$Resumen.$C$14]" office:value-type="float" office:value="1650" calcext:value-type="float">
            <text:p>1650</text:p>
          </table:table-cell>
          <table:table-cell table:style-name="ce218" table:formula="of:=+[.J86]*[$Resumen.$C$14]" office:value-type="float" office:value="975" calcext:value-type="float">
            <text:p>975</text:p>
          </table:table-cell>
          <table:table-cell table:style-name="ce218" table:formula="of:=+[.K86]*[$Resumen.$C$14]" office:value-type="float" office:value="990" calcext:value-type="float">
            <text:p>990</text:p>
          </table:table-cell>
          <table:table-cell table:style-name="ce218" table:formula="of:=+[.L86]*[$Resumen.$C$14]" office:value-type="float" office:value="990" calcext:value-type="float">
            <text:p>990</text:p>
          </table:table-cell>
          <table:table-cell table:style-name="ce218" table:formula="of:=+[.M86]*[$Resumen.$C$14]" office:value-type="float" office:value="1080" calcext:value-type="float">
            <text:p>1080</text:p>
          </table:table-cell>
          <table:table-cell table:style-name="ce218" table:formula="of:=+[.N86]*[$Resumen.$C$14]" office:value-type="float" office:value="1740" calcext:value-type="float">
            <text:p>1740</text:p>
          </table:table-cell>
          <table:table-cell table:style-name="ce229" table:formula="of:=SUM([.R86:.AC86])" office:value-type="float" office:value="12930" calcext:value-type="float">
            <text:p>12930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5" calcext:value-type="float">
            <text:p>5</text:p>
          </table:table-cell>
          <table:table-cell table:style-name="ce218" table:formula="of:=+ROUND([.$O$87]*[.C4];0)" office:value-type="float" office:value="65" calcext:value-type="float">
            <text:p>65</text:p>
          </table:table-cell>
          <table:table-cell table:style-name="ce218" table:formula="of:=+ROUND([.$O$87]*[.D4];0)" office:value-type="float" office:value="66" calcext:value-type="float">
            <text:p>66</text:p>
          </table:table-cell>
          <table:table-cell table:style-name="ce218" table:formula="of:=+ROUND([.$O$87]*[.E4];0)" office:value-type="float" office:value="67" calcext:value-type="float">
            <text:p>67</text:p>
          </table:table-cell>
          <table:table-cell table:style-name="ce218" table:formula="of:=+ROUND([.$O$87]*[.F4];0)" office:value-type="float" office:value="67" calcext:value-type="float">
            <text:p>67</text:p>
          </table:table-cell>
          <table:table-cell table:style-name="ce218" table:formula="of:=+ROUND([.$O$87]*[.G4];0)" office:value-type="float" office:value="66" calcext:value-type="float">
            <text:p>66</text:p>
          </table:table-cell>
          <table:table-cell table:style-name="ce218" table:formula="of:=+ROUND([.$O$87]*[.H4];0)" office:value-type="float" office:value="65" calcext:value-type="float">
            <text:p>65</text:p>
          </table:table-cell>
          <table:table-cell table:style-name="ce218" table:formula="of:=+ROUND([.$O$87]*[.I4];0)" office:value-type="float" office:value="118" calcext:value-type="float">
            <text:p>118</text:p>
          </table:table-cell>
          <table:table-cell table:style-name="ce218" table:formula="of:=+ROUND([.$O$87]*[.J4];0)" office:value-type="float" office:value="70" calcext:value-type="float">
            <text:p>70</text:p>
          </table:table-cell>
          <table:table-cell table:style-name="ce218" table:formula="of:=+ROUND([.$O$87]*[.K4];0)" office:value-type="float" office:value="71" calcext:value-type="float">
            <text:p>71</text:p>
          </table:table-cell>
          <table:table-cell table:style-name="ce218" table:formula="of:=+ROUND([.$O$87]*[.L4];0)" office:value-type="float" office:value="71" calcext:value-type="float">
            <text:p>71</text:p>
          </table:table-cell>
          <table:table-cell table:style-name="ce218" table:formula="of:=+ROUND([.$O$87]*[.M4];0)" office:value-type="float" office:value="78" calcext:value-type="float">
            <text:p>78</text:p>
          </table:table-cell>
          <table:table-cell table:style-name="ce218" table:formula="of:=+ROUND([.$O$87]*[.N4];0)" office:value-type="float" office:value="124" calcext:value-type="float">
            <text:p>124</text:p>
          </table:table-cell>
          <table:table-cell table:style-name="ce229" table:formula="of:=+ROUND([.O86]*(1+[.$D$6]);0)" office:value-type="float" office:value="926" calcext:value-type="float">
            <text:p>926</text:p>
          </table:table-cell>
          <table:table-cell/>
          <table:table-cell table:style-name="ce206" office:value-type="float" office:value="5" calcext:value-type="float">
            <text:p>5</text:p>
          </table:table-cell>
          <table:table-cell table:style-name="ce218" table:formula="of:=+[.C87]*[$Resumen.$C$14]" office:value-type="float" office:value="975" calcext:value-type="float">
            <text:p>975</text:p>
          </table:table-cell>
          <table:table-cell table:style-name="ce218" table:formula="of:=+[.D87]*[$Resumen.$C$14]" office:value-type="float" office:value="990" calcext:value-type="float">
            <text:p>990</text:p>
          </table:table-cell>
          <table:table-cell table:style-name="ce218" table:formula="of:=+[.E87]*[$Resumen.$C$14]" office:value-type="float" office:value="1005" calcext:value-type="float">
            <text:p>1005</text:p>
          </table:table-cell>
          <table:table-cell table:style-name="ce218" table:formula="of:=+[.F87]*[$Resumen.$C$14]" office:value-type="float" office:value="1005" calcext:value-type="float">
            <text:p>1005</text:p>
          </table:table-cell>
          <table:table-cell table:style-name="ce218" table:formula="of:=+[.G87]*[$Resumen.$C$14]" office:value-type="float" office:value="990" calcext:value-type="float">
            <text:p>990</text:p>
          </table:table-cell>
          <table:table-cell table:style-name="ce218" table:formula="of:=+[.H87]*[$Resumen.$C$14]" office:value-type="float" office:value="975" calcext:value-type="float">
            <text:p>975</text:p>
          </table:table-cell>
          <table:table-cell table:style-name="ce218" table:formula="of:=+[.I87]*[$Resumen.$C$14]" office:value-type="float" office:value="1770" calcext:value-type="float">
            <text:p>1770</text:p>
          </table:table-cell>
          <table:table-cell table:style-name="ce218" table:formula="of:=+[.J87]*[$Resumen.$C$14]" office:value-type="float" office:value="1050" calcext:value-type="float">
            <text:p>1050</text:p>
          </table:table-cell>
          <table:table-cell table:style-name="ce218" table:formula="of:=+[.K87]*[$Resumen.$C$14]" office:value-type="float" office:value="1065" calcext:value-type="float">
            <text:p>1065</text:p>
          </table:table-cell>
          <table:table-cell table:style-name="ce218" table:formula="of:=+[.L87]*[$Resumen.$C$14]" office:value-type="float" office:value="1065" calcext:value-type="float">
            <text:p>1065</text:p>
          </table:table-cell>
          <table:table-cell table:style-name="ce218" table:formula="of:=+[.M87]*[$Resumen.$C$14]" office:value-type="float" office:value="1170" calcext:value-type="float">
            <text:p>1170</text:p>
          </table:table-cell>
          <table:table-cell table:style-name="ce218" table:formula="of:=+[.N87]*[$Resumen.$C$14]" office:value-type="float" office:value="1860" calcext:value-type="float">
            <text:p>1860</text:p>
          </table:table-cell>
          <table:table-cell table:style-name="ce229" table:formula="of:=SUM([.R87:.AC87])" office:value-type="float" office:value="13920" calcext:value-type="float">
            <text:p>13920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6" calcext:value-type="float">
            <text:p>6</text:p>
          </table:table-cell>
          <table:table-cell table:style-name="ce218" table:formula="of:=+ROUND([.$O$88]*[.C4];0)" office:value-type="float" office:value="70" calcext:value-type="float">
            <text:p>70</text:p>
          </table:table-cell>
          <table:table-cell table:style-name="ce218" table:formula="of:=+ROUND([.$O$88]*[.D4];0)" office:value-type="float" office:value="70" calcext:value-type="float">
            <text:p>70</text:p>
          </table:table-cell>
          <table:table-cell table:style-name="ce218" table:formula="of:=+ROUND([.$O$88]*[.E4];0)" office:value-type="float" office:value="71" calcext:value-type="float">
            <text:p>71</text:p>
          </table:table-cell>
          <table:table-cell table:style-name="ce218" table:formula="of:=+ROUND([.$O$88]*[.F4];0)" office:value-type="float" office:value="71" calcext:value-type="float">
            <text:p>71</text:p>
          </table:table-cell>
          <table:table-cell table:style-name="ce218" table:formula="of:=+ROUND([.$O$88]*[.G4];0)" office:value-type="float" office:value="70" calcext:value-type="float">
            <text:p>70</text:p>
          </table:table-cell>
          <table:table-cell table:style-name="ce218" table:formula="of:=+ROUND([.$O$88]*[.H4];0)" office:value-type="float" office:value="69" calcext:value-type="float">
            <text:p>69</text:p>
          </table:table-cell>
          <table:table-cell table:style-name="ce218" table:formula="of:=+ROUND([.$O$88]*[.I4];0)" office:value-type="float" office:value="126" calcext:value-type="float">
            <text:p>126</text:p>
          </table:table-cell>
          <table:table-cell table:style-name="ce218" table:formula="of:=+ROUND([.$O$88]*[.J4];0)" office:value-type="float" office:value="75" calcext:value-type="float">
            <text:p>75</text:p>
          </table:table-cell>
          <table:table-cell table:style-name="ce218" table:formula="of:=+ROUND([.$O$88]*[.K4];0)" office:value-type="float" office:value="76" calcext:value-type="float">
            <text:p>76</text:p>
          </table:table-cell>
          <table:table-cell table:style-name="ce218" table:formula="of:=+ROUND([.$O$88]*[.L4];0)" office:value-type="float" office:value="76" calcext:value-type="float">
            <text:p>76</text:p>
          </table:table-cell>
          <table:table-cell table:style-name="ce218" table:formula="of:=+ROUND([.$O$88]*[.M4];0)" office:value-type="float" office:value="83" calcext:value-type="float">
            <text:p>83</text:p>
          </table:table-cell>
          <table:table-cell table:style-name="ce218" table:formula="of:=+ROUND([.$O$88]*[.N4];0)" office:value-type="float" office:value="133" calcext:value-type="float">
            <text:p>133</text:p>
          </table:table-cell>
          <table:table-cell table:style-name="ce229" table:formula="of:=+ROUND([.O87]*(1+[.$D$6]);0)" office:value-type="float" office:value="991" calcext:value-type="float">
            <text:p>991</text:p>
          </table:table-cell>
          <table:table-cell/>
          <table:table-cell table:style-name="ce206" office:value-type="float" office:value="6" calcext:value-type="float">
            <text:p>6</text:p>
          </table:table-cell>
          <table:table-cell table:style-name="ce218" table:formula="of:=+[.C88]*[$Resumen.$C$14]" office:value-type="float" office:value="1050" calcext:value-type="float">
            <text:p>1050</text:p>
          </table:table-cell>
          <table:table-cell table:style-name="ce218" table:formula="of:=+[.D88]*[$Resumen.$C$14]" office:value-type="float" office:value="1050" calcext:value-type="float">
            <text:p>1050</text:p>
          </table:table-cell>
          <table:table-cell table:style-name="ce218" table:formula="of:=+[.E88]*[$Resumen.$C$14]" office:value-type="float" office:value="1065" calcext:value-type="float">
            <text:p>1065</text:p>
          </table:table-cell>
          <table:table-cell table:style-name="ce218" table:formula="of:=+[.F88]*[$Resumen.$C$14]" office:value-type="float" office:value="1065" calcext:value-type="float">
            <text:p>1065</text:p>
          </table:table-cell>
          <table:table-cell table:style-name="ce218" table:formula="of:=+[.G88]*[$Resumen.$C$14]" office:value-type="float" office:value="1050" calcext:value-type="float">
            <text:p>1050</text:p>
          </table:table-cell>
          <table:table-cell table:style-name="ce218" table:formula="of:=+[.H88]*[$Resumen.$C$14]" office:value-type="float" office:value="1035" calcext:value-type="float">
            <text:p>1035</text:p>
          </table:table-cell>
          <table:table-cell table:style-name="ce218" table:formula="of:=+[.I88]*[$Resumen.$C$14]" office:value-type="float" office:value="1890" calcext:value-type="float">
            <text:p>1890</text:p>
          </table:table-cell>
          <table:table-cell table:style-name="ce218" table:formula="of:=+[.J88]*[$Resumen.$C$14]" office:value-type="float" office:value="1125" calcext:value-type="float">
            <text:p>1125</text:p>
          </table:table-cell>
          <table:table-cell table:style-name="ce218" table:formula="of:=+[.K88]*[$Resumen.$C$14]" office:value-type="float" office:value="1140" calcext:value-type="float">
            <text:p>1140</text:p>
          </table:table-cell>
          <table:table-cell table:style-name="ce218" table:formula="of:=+[.L88]*[$Resumen.$C$14]" office:value-type="float" office:value="1140" calcext:value-type="float">
            <text:p>1140</text:p>
          </table:table-cell>
          <table:table-cell table:style-name="ce218" table:formula="of:=+[.M88]*[$Resumen.$C$14]" office:value-type="float" office:value="1245" calcext:value-type="float">
            <text:p>1245</text:p>
          </table:table-cell>
          <table:table-cell table:style-name="ce218" table:formula="of:=+[.N88]*[$Resumen.$C$14]" office:value-type="float" office:value="1995" calcext:value-type="float">
            <text:p>1995</text:p>
          </table:table-cell>
          <table:table-cell table:style-name="ce229" table:formula="of:=SUM([.R88:.AC88])" office:value-type="float" office:value="14850" calcext:value-type="float">
            <text:p>14850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7" calcext:value-type="float">
            <text:p>7</text:p>
          </table:table-cell>
          <table:table-cell table:style-name="ce218" table:formula="of:=+ROUND([.$O$89]*[.C4];0)" office:value-type="float" office:value="75" calcext:value-type="float">
            <text:p>75</text:p>
          </table:table-cell>
          <table:table-cell table:style-name="ce218" table:formula="of:=+ROUND([.$O$89]*[.D4];0)" office:value-type="float" office:value="75" calcext:value-type="float">
            <text:p>75</text:p>
          </table:table-cell>
          <table:table-cell table:style-name="ce218" table:formula="of:=+ROUND([.$O$89]*[.E4];0)" office:value-type="float" office:value="76" calcext:value-type="float">
            <text:p>76</text:p>
          </table:table-cell>
          <table:table-cell table:style-name="ce218" table:formula="of:=+ROUND([.$O$89]*[.F4];0)" office:value-type="float" office:value="76" calcext:value-type="float">
            <text:p>76</text:p>
          </table:table-cell>
          <table:table-cell table:style-name="ce218" table:formula="of:=+ROUND([.$O$89]*[.G4];0)" office:value-type="float" office:value="75" calcext:value-type="float">
            <text:p>75</text:p>
          </table:table-cell>
          <table:table-cell table:style-name="ce218" table:formula="of:=+ROUND([.$O$89]*[.H4];0)" office:value-type="float" office:value="74" calcext:value-type="float">
            <text:p>74</text:p>
          </table:table-cell>
          <table:table-cell table:style-name="ce218" table:formula="of:=+ROUND([.$O$89]*[.I4];0)" office:value-type="float" office:value="135" calcext:value-type="float">
            <text:p>135</text:p>
          </table:table-cell>
          <table:table-cell table:style-name="ce218" table:formula="of:=+ROUND([.$O$89]*[.J4];0)" office:value-type="float" office:value="80" calcext:value-type="float">
            <text:p>80</text:p>
          </table:table-cell>
          <table:table-cell table:style-name="ce218" table:formula="of:=+ROUND([.$O$89]*[.K4];0)" office:value-type="float" office:value="81" calcext:value-type="float">
            <text:p>81</text:p>
          </table:table-cell>
          <table:table-cell table:style-name="ce218" table:formula="of:=+ROUND([.$O$89]*[.L4];0)" office:value-type="float" office:value="81" calcext:value-type="float">
            <text:p>81</text:p>
          </table:table-cell>
          <table:table-cell table:style-name="ce218" table:formula="of:=+ROUND([.$O$89]*[.M4];0)" office:value-type="float" office:value="89" calcext:value-type="float">
            <text:p>89</text:p>
          </table:table-cell>
          <table:table-cell table:style-name="ce218" table:formula="of:=+ROUND([.$O$89]*[.N4];0)" office:value-type="float" office:value="142" calcext:value-type="float">
            <text:p>142</text:p>
          </table:table-cell>
          <table:table-cell table:style-name="ce229" table:formula="of:=+ROUND([.O88]*(1+[.$D$6]);0)" office:value-type="float" office:value="1060" calcext:value-type="float">
            <text:p>1060</text:p>
          </table:table-cell>
          <table:table-cell/>
          <table:table-cell table:style-name="ce206" office:value-type="float" office:value="7" calcext:value-type="float">
            <text:p>7</text:p>
          </table:table-cell>
          <table:table-cell table:style-name="ce218" table:formula="of:=+[.C89]*[$Resumen.$C$14]" office:value-type="float" office:value="1125" calcext:value-type="float">
            <text:p>1125</text:p>
          </table:table-cell>
          <table:table-cell table:style-name="ce218" table:formula="of:=+[.D89]*[$Resumen.$C$14]" office:value-type="float" office:value="1125" calcext:value-type="float">
            <text:p>1125</text:p>
          </table:table-cell>
          <table:table-cell table:style-name="ce218" table:formula="of:=+[.E89]*[$Resumen.$C$14]" office:value-type="float" office:value="1140" calcext:value-type="float">
            <text:p>1140</text:p>
          </table:table-cell>
          <table:table-cell table:style-name="ce218" table:formula="of:=+[.F89]*[$Resumen.$C$14]" office:value-type="float" office:value="1140" calcext:value-type="float">
            <text:p>1140</text:p>
          </table:table-cell>
          <table:table-cell table:style-name="ce218" table:formula="of:=+[.G89]*[$Resumen.$C$14]" office:value-type="float" office:value="1125" calcext:value-type="float">
            <text:p>1125</text:p>
          </table:table-cell>
          <table:table-cell table:style-name="ce218" table:formula="of:=+[.H89]*[$Resumen.$C$14]" office:value-type="float" office:value="1110" calcext:value-type="float">
            <text:p>1110</text:p>
          </table:table-cell>
          <table:table-cell table:style-name="ce218" table:formula="of:=+[.I89]*[$Resumen.$C$14]" office:value-type="float" office:value="2025" calcext:value-type="float">
            <text:p>2025</text:p>
          </table:table-cell>
          <table:table-cell table:style-name="ce218" table:formula="of:=+[.J89]*[$Resumen.$C$14]" office:value-type="float" office:value="1200" calcext:value-type="float">
            <text:p>1200</text:p>
          </table:table-cell>
          <table:table-cell table:style-name="ce218" table:formula="of:=+[.K89]*[$Resumen.$C$14]" office:value-type="float" office:value="1215" calcext:value-type="float">
            <text:p>1215</text:p>
          </table:table-cell>
          <table:table-cell table:style-name="ce218" table:formula="of:=+[.L89]*[$Resumen.$C$14]" office:value-type="float" office:value="1215" calcext:value-type="float">
            <text:p>1215</text:p>
          </table:table-cell>
          <table:table-cell table:style-name="ce218" table:formula="of:=+[.M89]*[$Resumen.$C$14]" office:value-type="float" office:value="1335" calcext:value-type="float">
            <text:p>1335</text:p>
          </table:table-cell>
          <table:table-cell table:style-name="ce218" table:formula="of:=+[.N89]*[$Resumen.$C$14]" office:value-type="float" office:value="2130" calcext:value-type="float">
            <text:p>2130</text:p>
          </table:table-cell>
          <table:table-cell table:style-name="ce229" table:formula="of:=SUM([.R89:.AC89])" office:value-type="float" office:value="15885" calcext:value-type="float">
            <text:p>15885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8" calcext:value-type="float">
            <text:p>8</text:p>
          </table:table-cell>
          <table:table-cell table:style-name="ce218" table:formula="of:=+ROUND([.$O$90]*[.C4];0)" office:value-type="float" office:value="80" calcext:value-type="float">
            <text:p>80</text:p>
          </table:table-cell>
          <table:table-cell table:style-name="ce218" table:formula="of:=+ROUND([.$O$90]*[.D4];0)" office:value-type="float" office:value="81" calcext:value-type="float">
            <text:p>81</text:p>
          </table:table-cell>
          <table:table-cell table:style-name="ce218" table:formula="of:=+ROUND([.$O$90]*[.E4];0)" office:value-type="float" office:value="82" calcext:value-type="float">
            <text:p>82</text:p>
          </table:table-cell>
          <table:table-cell table:style-name="ce218" table:formula="of:=+ROUND([.$O$90]*[.F4];0)" office:value-type="float" office:value="82" calcext:value-type="float">
            <text:p>82</text:p>
          </table:table-cell>
          <table:table-cell table:style-name="ce218" table:formula="of:=+ROUND([.$O$90]*[.G4];0)" office:value-type="float" office:value="81" calcext:value-type="float">
            <text:p>81</text:p>
          </table:table-cell>
          <table:table-cell table:style-name="ce218" table:formula="of:=+ROUND([.$O$90]*[.H4];0)" office:value-type="float" office:value="79" calcext:value-type="float">
            <text:p>79</text:p>
          </table:table-cell>
          <table:table-cell table:style-name="ce218" table:formula="of:=+ROUND([.$O$90]*[.I4];0)" office:value-type="float" office:value="144" calcext:value-type="float">
            <text:p>144</text:p>
          </table:table-cell>
          <table:table-cell table:style-name="ce218" table:formula="of:=+ROUND([.$O$90]*[.J4];0)" office:value-type="float" office:value="86" calcext:value-type="float">
            <text:p>86</text:p>
          </table:table-cell>
          <table:table-cell table:style-name="ce218" table:formula="of:=+ROUND([.$O$90]*[.K4];0)" office:value-type="float" office:value="87" calcext:value-type="float">
            <text:p>87</text:p>
          </table:table-cell>
          <table:table-cell table:style-name="ce218" table:formula="of:=+ROUND([.$O$90]*[.L4];0)" office:value-type="float" office:value="87" calcext:value-type="float">
            <text:p>87</text:p>
          </table:table-cell>
          <table:table-cell table:style-name="ce218" table:formula="of:=+ROUND([.$O$90]*[.M4];0)" office:value-type="float" office:value="95" calcext:value-type="float">
            <text:p>95</text:p>
          </table:table-cell>
          <table:table-cell table:style-name="ce218" table:formula="of:=+ROUND([.$O$90]*[.N4];0)" office:value-type="float" office:value="152" calcext:value-type="float">
            <text:p>152</text:p>
          </table:table-cell>
          <table:table-cell table:style-name="ce229" table:formula="of:=+ROUND([.O89]*(1+[.$D$6]);0)" office:value-type="float" office:value="1134" calcext:value-type="float">
            <text:p>1134</text:p>
          </table:table-cell>
          <table:table-cell/>
          <table:table-cell table:style-name="ce206" office:value-type="float" office:value="8" calcext:value-type="float">
            <text:p>8</text:p>
          </table:table-cell>
          <table:table-cell table:style-name="ce218" table:formula="of:=+[.C90]*[$Resumen.$C$14]" office:value-type="float" office:value="1200" calcext:value-type="float">
            <text:p>1200</text:p>
          </table:table-cell>
          <table:table-cell table:style-name="ce218" table:formula="of:=+[.D90]*[$Resumen.$C$14]" office:value-type="float" office:value="1215" calcext:value-type="float">
            <text:p>1215</text:p>
          </table:table-cell>
          <table:table-cell table:style-name="ce218" table:formula="of:=+[.E90]*[$Resumen.$C$14]" office:value-type="float" office:value="1230" calcext:value-type="float">
            <text:p>1230</text:p>
          </table:table-cell>
          <table:table-cell table:style-name="ce218" table:formula="of:=+[.F90]*[$Resumen.$C$14]" office:value-type="float" office:value="1230" calcext:value-type="float">
            <text:p>1230</text:p>
          </table:table-cell>
          <table:table-cell table:style-name="ce218" table:formula="of:=+[.G90]*[$Resumen.$C$14]" office:value-type="float" office:value="1215" calcext:value-type="float">
            <text:p>1215</text:p>
          </table:table-cell>
          <table:table-cell table:style-name="ce218" table:formula="of:=+[.H90]*[$Resumen.$C$14]" office:value-type="float" office:value="1185" calcext:value-type="float">
            <text:p>1185</text:p>
          </table:table-cell>
          <table:table-cell table:style-name="ce218" table:formula="of:=+[.I90]*[$Resumen.$C$14]" office:value-type="float" office:value="2160" calcext:value-type="float">
            <text:p>2160</text:p>
          </table:table-cell>
          <table:table-cell table:style-name="ce218" table:formula="of:=+[.J90]*[$Resumen.$C$14]" office:value-type="float" office:value="1290" calcext:value-type="float">
            <text:p>1290</text:p>
          </table:table-cell>
          <table:table-cell table:style-name="ce218" table:formula="of:=+[.K90]*[$Resumen.$C$14]" office:value-type="float" office:value="1305" calcext:value-type="float">
            <text:p>1305</text:p>
          </table:table-cell>
          <table:table-cell table:style-name="ce218" table:formula="of:=+[.L90]*[$Resumen.$C$14]" office:value-type="float" office:value="1305" calcext:value-type="float">
            <text:p>1305</text:p>
          </table:table-cell>
          <table:table-cell table:style-name="ce218" table:formula="of:=+[.M90]*[$Resumen.$C$14]" office:value-type="float" office:value="1425" calcext:value-type="float">
            <text:p>1425</text:p>
          </table:table-cell>
          <table:table-cell table:style-name="ce218" table:formula="of:=+[.N90]*[$Resumen.$C$14]" office:value-type="float" office:value="2280" calcext:value-type="float">
            <text:p>2280</text:p>
          </table:table-cell>
          <table:table-cell table:style-name="ce229" table:formula="of:=SUM([.R90:.AC90])" office:value-type="float" office:value="17040" calcext:value-type="float">
            <text:p>17040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9" calcext:value-type="float">
            <text:p>9</text:p>
          </table:table-cell>
          <table:table-cell table:style-name="ce218" table:formula="of:=+ROUND([.$O$91]*[.C4];0)" office:value-type="float" office:value="85" calcext:value-type="float">
            <text:p>85</text:p>
          </table:table-cell>
          <table:table-cell table:style-name="ce218" table:formula="of:=+ROUND([.$O$91]*[.D4];0)" office:value-type="float" office:value="86" calcext:value-type="float">
            <text:p>86</text:p>
          </table:table-cell>
          <table:table-cell table:style-name="ce218" table:formula="of:=+ROUND([.$O$91]*[.E4];0)" office:value-type="float" office:value="87" calcext:value-type="float">
            <text:p>87</text:p>
          </table:table-cell>
          <table:table-cell table:style-name="ce218" table:formula="of:=+ROUND([.$O$91]*[.F4];0)" office:value-type="float" office:value="87" calcext:value-type="float">
            <text:p>87</text:p>
          </table:table-cell>
          <table:table-cell table:style-name="ce218" table:formula="of:=+ROUND([.$O$91]*[.G4];0)" office:value-type="float" office:value="86" calcext:value-type="float">
            <text:p>86</text:p>
          </table:table-cell>
          <table:table-cell table:style-name="ce218" table:formula="of:=+ROUND([.$O$91]*[.H4];0)" office:value-type="float" office:value="85" calcext:value-type="float">
            <text:p>85</text:p>
          </table:table-cell>
          <table:table-cell table:style-name="ce218" table:formula="of:=+ROUND([.$O$91]*[.I4];0)" office:value-type="float" office:value="154" calcext:value-type="float">
            <text:p>154</text:p>
          </table:table-cell>
          <table:table-cell table:style-name="ce218" table:formula="of:=+ROUND([.$O$91]*[.J4];0)" office:value-type="float" office:value="92" calcext:value-type="float">
            <text:p>92</text:p>
          </table:table-cell>
          <table:table-cell table:style-name="ce218" table:formula="of:=+ROUND([.$O$91]*[.K4];0)" office:value-type="float" office:value="93" calcext:value-type="float">
            <text:p>93</text:p>
          </table:table-cell>
          <table:table-cell table:style-name="ce218" table:formula="of:=+ROUND([.$O$91]*[.L4];0)" office:value-type="float" office:value="93" calcext:value-type="float">
            <text:p>93</text:p>
          </table:table-cell>
          <table:table-cell table:style-name="ce218" table:formula="of:=+ROUND([.$O$91]*[.M4];0)" office:value-type="float" office:value="102" calcext:value-type="float">
            <text:p>102</text:p>
          </table:table-cell>
          <table:table-cell table:style-name="ce218" table:formula="of:=+ROUND([.$O$91]*[.N4];0)" office:value-type="float" office:value="163" calcext:value-type="float">
            <text:p>163</text:p>
          </table:table-cell>
          <table:table-cell table:style-name="ce229" table:formula="of:=+ROUND([.O90]*(1+[.$D$6]);0)" office:value-type="float" office:value="1213" calcext:value-type="float">
            <text:p>1213</text:p>
          </table:table-cell>
          <table:table-cell/>
          <table:table-cell table:style-name="ce206" office:value-type="float" office:value="9" calcext:value-type="float">
            <text:p>9</text:p>
          </table:table-cell>
          <table:table-cell table:style-name="ce218" table:formula="of:=+[.C91]*[$Resumen.$C$14]" office:value-type="float" office:value="1275" calcext:value-type="float">
            <text:p>1275</text:p>
          </table:table-cell>
          <table:table-cell table:style-name="ce218" table:formula="of:=+[.D91]*[$Resumen.$C$14]" office:value-type="float" office:value="1290" calcext:value-type="float">
            <text:p>1290</text:p>
          </table:table-cell>
          <table:table-cell table:style-name="ce218" table:formula="of:=+[.E91]*[$Resumen.$C$14]" office:value-type="float" office:value="1305" calcext:value-type="float">
            <text:p>1305</text:p>
          </table:table-cell>
          <table:table-cell table:style-name="ce218" table:formula="of:=+[.F91]*[$Resumen.$C$14]" office:value-type="float" office:value="1305" calcext:value-type="float">
            <text:p>1305</text:p>
          </table:table-cell>
          <table:table-cell table:style-name="ce218" table:formula="of:=+[.G91]*[$Resumen.$C$14]" office:value-type="float" office:value="1290" calcext:value-type="float">
            <text:p>1290</text:p>
          </table:table-cell>
          <table:table-cell table:style-name="ce218" table:formula="of:=+[.H91]*[$Resumen.$C$14]" office:value-type="float" office:value="1275" calcext:value-type="float">
            <text:p>1275</text:p>
          </table:table-cell>
          <table:table-cell table:style-name="ce218" table:formula="of:=+[.I91]*[$Resumen.$C$14]" office:value-type="float" office:value="2310" calcext:value-type="float">
            <text:p>2310</text:p>
          </table:table-cell>
          <table:table-cell table:style-name="ce218" table:formula="of:=+[.J91]*[$Resumen.$C$14]" office:value-type="float" office:value="1380" calcext:value-type="float">
            <text:p>1380</text:p>
          </table:table-cell>
          <table:table-cell table:style-name="ce218" table:formula="of:=+[.K91]*[$Resumen.$C$14]" office:value-type="float" office:value="1395" calcext:value-type="float">
            <text:p>1395</text:p>
          </table:table-cell>
          <table:table-cell table:style-name="ce218" table:formula="of:=+[.L91]*[$Resumen.$C$14]" office:value-type="float" office:value="1395" calcext:value-type="float">
            <text:p>1395</text:p>
          </table:table-cell>
          <table:table-cell table:style-name="ce218" table:formula="of:=+[.M91]*[$Resumen.$C$14]" office:value-type="float" office:value="1530" calcext:value-type="float">
            <text:p>1530</text:p>
          </table:table-cell>
          <table:table-cell table:style-name="ce218" table:formula="of:=+[.N91]*[$Resumen.$C$14]" office:value-type="float" office:value="2445" calcext:value-type="float">
            <text:p>2445</text:p>
          </table:table-cell>
          <table:table-cell table:style-name="ce229" table:formula="of:=SUM([.R91:.AC91])" office:value-type="float" office:value="18195" calcext:value-type="float">
            <text:p>18195</text:p>
          </table:table-cell>
          <table:table-cell table:number-columns-repeated="16354"/>
        </table:table-row>
        <table:table-row table:style-name="ro8">
          <table:table-cell/>
          <table:table-cell table:style-name="ce206" office:value-type="float" office:value="10" calcext:value-type="float">
            <text:p>10</text:p>
          </table:table-cell>
          <table:table-cell table:style-name="ce218" table:formula="of:=+ROUND([.$O$92]*[.C4];0)" office:value-type="float" office:value="91" calcext:value-type="float">
            <text:p>91</text:p>
          </table:table-cell>
          <table:table-cell table:style-name="ce218" table:formula="of:=+ROUND([.$O$92]*[.D4];0)" office:value-type="float" office:value="92" calcext:value-type="float">
            <text:p>92</text:p>
          </table:table-cell>
          <table:table-cell table:style-name="ce218" table:formula="of:=+ROUND([.$O$92]*[.E4];0)" office:value-type="float" office:value="93" calcext:value-type="float">
            <text:p>93</text:p>
          </table:table-cell>
          <table:table-cell table:style-name="ce218" table:formula="of:=+ROUND([.$O$92]*[.F4];0)" office:value-type="float" office:value="94" calcext:value-type="float">
            <text:p>94</text:p>
          </table:table-cell>
          <table:table-cell table:style-name="ce218" table:formula="of:=+ROUND([.$O$92]*[.G4];0)" office:value-type="float" office:value="92" calcext:value-type="float">
            <text:p>92</text:p>
          </table:table-cell>
          <table:table-cell table:style-name="ce218" table:formula="of:=+ROUND([.$O$92]*[.H4];0)" office:value-type="float" office:value="91" calcext:value-type="float">
            <text:p>91</text:p>
          </table:table-cell>
          <table:table-cell table:style-name="ce218" table:formula="of:=+ROUND([.$O$92]*[.I4];0)" office:value-type="float" office:value="165" calcext:value-type="float">
            <text:p>165</text:p>
          </table:table-cell>
          <table:table-cell table:style-name="ce218" table:formula="of:=+ROUND([.$O$92]*[.J4];0)" office:value-type="float" office:value="98" calcext:value-type="float">
            <text:p>98</text:p>
          </table:table-cell>
          <table:table-cell table:style-name="ce218" table:formula="of:=+ROUND([.$O$92]*[.K4];0)" office:value-type="float" office:value="99" calcext:value-type="float">
            <text:p>99</text:p>
          </table:table-cell>
          <table:table-cell table:style-name="ce218" table:formula="of:=+ROUND([.$O$92]*[.L4];0)" office:value-type="float" office:value="99" calcext:value-type="float">
            <text:p>99</text:p>
          </table:table-cell>
          <table:table-cell table:style-name="ce218" table:formula="of:=+ROUND([.$O$92]*[.M4];0)" office:value-type="float" office:value="109" calcext:value-type="float">
            <text:p>109</text:p>
          </table:table-cell>
          <table:table-cell table:style-name="ce218" table:formula="of:=+ROUND([.$O$92]*[.N4];0)" office:value-type="float" office:value="174" calcext:value-type="float">
            <text:p>174</text:p>
          </table:table-cell>
          <table:table-cell table:style-name="ce229" table:formula="of:=+ROUND([.O91]*(1+[.$D$6]);0)" office:value-type="float" office:value="1298" calcext:value-type="float">
            <text:p>1298</text:p>
          </table:table-cell>
          <table:table-cell/>
          <table:table-cell table:style-name="ce206" office:value-type="float" office:value="10" calcext:value-type="float">
            <text:p>10</text:p>
          </table:table-cell>
          <table:table-cell table:style-name="ce218" table:formula="of:=+[.C92]*[$Resumen.$C$14]" office:value-type="float" office:value="1365" calcext:value-type="float">
            <text:p>1365</text:p>
          </table:table-cell>
          <table:table-cell table:style-name="ce218" table:formula="of:=+[.D92]*[$Resumen.$C$14]" office:value-type="float" office:value="1380" calcext:value-type="float">
            <text:p>1380</text:p>
          </table:table-cell>
          <table:table-cell table:style-name="ce218" table:formula="of:=+[.E92]*[$Resumen.$C$14]" office:value-type="float" office:value="1395" calcext:value-type="float">
            <text:p>1395</text:p>
          </table:table-cell>
          <table:table-cell table:style-name="ce218" table:formula="of:=+[.F92]*[$Resumen.$C$14]" office:value-type="float" office:value="1410" calcext:value-type="float">
            <text:p>1410</text:p>
          </table:table-cell>
          <table:table-cell table:style-name="ce218" table:formula="of:=+[.G92]*[$Resumen.$C$14]" office:value-type="float" office:value="1380" calcext:value-type="float">
            <text:p>1380</text:p>
          </table:table-cell>
          <table:table-cell table:style-name="ce218" table:formula="of:=+[.H92]*[$Resumen.$C$14]" office:value-type="float" office:value="1365" calcext:value-type="float">
            <text:p>1365</text:p>
          </table:table-cell>
          <table:table-cell table:style-name="ce218" table:formula="of:=+[.I92]*[$Resumen.$C$14]" office:value-type="float" office:value="2475" calcext:value-type="float">
            <text:p>2475</text:p>
          </table:table-cell>
          <table:table-cell table:style-name="ce218" table:formula="of:=+[.J92]*[$Resumen.$C$14]" office:value-type="float" office:value="1470" calcext:value-type="float">
            <text:p>1470</text:p>
          </table:table-cell>
          <table:table-cell table:style-name="ce218" table:formula="of:=+[.K92]*[$Resumen.$C$14]" office:value-type="float" office:value="1485" calcext:value-type="float">
            <text:p>1485</text:p>
          </table:table-cell>
          <table:table-cell table:style-name="ce218" table:formula="of:=+[.L92]*[$Resumen.$C$14]" office:value-type="float" office:value="1485" calcext:value-type="float">
            <text:p>1485</text:p>
          </table:table-cell>
          <table:table-cell table:style-name="ce218" table:formula="of:=+[.M92]*[$Resumen.$C$14]" office:value-type="float" office:value="1635" calcext:value-type="float">
            <text:p>1635</text:p>
          </table:table-cell>
          <table:table-cell table:style-name="ce218" table:formula="of:=+[.N92]*[$Resumen.$C$14]" office:value-type="float" office:value="2610" calcext:value-type="float">
            <text:p>2610</text:p>
          </table:table-cell>
          <table:table-cell table:style-name="ce229" table:formula="of:=SUM([.R92:.AC92])" office:value-type="float" office:value="19455" calcext:value-type="float">
            <text:p>19455</text:p>
          </table:table-cell>
          <table:table-cell table:number-columns-repeated="16354"/>
        </table:table-row>
        <table:table-row table:style-name="ro8" table:number-rows-repeated="2">
          <table:table-cell table:number-columns-repeated="16384"/>
        </table:table-row>
        <table:table-row table:style-name="ro8">
          <table:table-cell table:number-columns-repeated="2"/>
          <table:table-cell table:style-name="ce207" office:value-type="string" calcext:value-type="string" table:number-columns-spanned="12" table:number-rows-spanned="1">
            <text:p>SERVICIO DE VULCANIZADO DE LLANTAS <text:s/>EN UNIDADES/ ANUALES</text:p>
          </table:table-cell>
          <table:covered-table-cell table:number-columns-repeated="11" table:style-name="ce215"/>
          <table:table-cell table:number-columns-repeated="3"/>
          <table:table-cell table:style-name="ce207" office:value-type="string" calcext:value-type="string" table:number-columns-spanned="12" table:number-rows-spanned="1">
            <text:p>VENTAS ANUALES (INGRESOS) DE SERVICIO DE VULCANIZADO</text:p>
          </table:table-cell>
          <table:covered-table-cell table:number-columns-repeated="11" table:style-name="ce215"/>
          <table:table-cell table:number-columns-repeated="16355"/>
        </table:table-row>
        <table:table-row table:style-name="ro8">
          <table:table-cell table:number-columns-repeated="2"/>
          <table:table-cell table:style-name="ce215" table:number-columns-repeated="12"/>
          <table:table-cell table:number-columns-repeated="3"/>
          <table:table-cell table:style-name="ce215" table:number-columns-repeated="12"/>
          <table:table-cell table:number-columns-repeated="16355"/>
        </table:table-row>
        <table:table-row table:style-name="ro8">
          <table:table-cell table:number-columns-repeated="2"/>
          <table:table-cell table:style-name="ce212" office:value-type="string" calcext:value-type="string">
            <text:p>Producto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3" calcext:value-type="float">
            <text:p>3</text:p>
          </table:table-cell>
          <table:table-cell table:style-name="ce212" office:value-type="float" office:value="4" calcext:value-type="float">
            <text:p>4</text:p>
          </table:table-cell>
          <table:table-cell table:style-name="ce212" office:value-type="float" office:value="5" calcext:value-type="float">
            <text:p>5</text:p>
          </table:table-cell>
          <table:table-cell table:style-name="ce212" office:value-type="float" office:value="6" calcext:value-type="float">
            <text:p>6</text:p>
          </table:table-cell>
          <table:table-cell table:style-name="ce212" office:value-type="float" office:value="7" calcext:value-type="float">
            <text:p>7</text:p>
          </table:table-cell>
          <table:table-cell table:style-name="ce212" office:value-type="float" office:value="8" calcext:value-type="float">
            <text:p>8</text:p>
          </table:table-cell>
          <table:table-cell table:style-name="ce212" office:value-type="float" office:value="9" calcext:value-type="float">
            <text:p>9</text:p>
          </table:table-cell>
          <table:table-cell table:style-name="ce212" office:value-type="float" office:value="10" calcext:value-type="float">
            <text:p>10</text:p>
          </table:table-cell>
          <table:table-cell table:style-name="ce212" office:value-type="string" calcext:value-type="string">
            <text:p>total</text:p>
          </table:table-cell>
          <table:table-cell table:number-columns-repeated="3"/>
          <table:table-cell table:style-name="ce212" office:value-type="string" calcext:value-type="string">
            <text:p>Producto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3" calcext:value-type="float">
            <text:p>3</text:p>
          </table:table-cell>
          <table:table-cell table:style-name="ce212" office:value-type="float" office:value="4" calcext:value-type="float">
            <text:p>4</text:p>
          </table:table-cell>
          <table:table-cell table:style-name="ce212" office:value-type="float" office:value="5" calcext:value-type="float">
            <text:p>5</text:p>
          </table:table-cell>
          <table:table-cell table:style-name="ce212" office:value-type="float" office:value="6" calcext:value-type="float">
            <text:p>6</text:p>
          </table:table-cell>
          <table:table-cell table:style-name="ce212" office:value-type="float" office:value="7" calcext:value-type="float">
            <text:p>7</text:p>
          </table:table-cell>
          <table:table-cell table:style-name="ce212" office:value-type="float" office:value="8" calcext:value-type="float">
            <text:p>8</text:p>
          </table:table-cell>
          <table:table-cell table:style-name="ce212" office:value-type="float" office:value="9" calcext:value-type="float">
            <text:p>9</text:p>
          </table:table-cell>
          <table:table-cell table:style-name="ce212" office:value-type="float" office:value="10" calcext:value-type="float">
            <text:p>10</text:p>
          </table:table-cell>
          <table:table-cell table:style-name="ce212" office:value-type="string" calcext:value-type="string">
            <text:p>total</text:p>
          </table:table-cell>
          <table:table-cell table:number-columns-repeated="16355"/>
        </table:table-row>
        <table:table-row table:style-name="ro8">
          <table:table-cell table:number-columns-repeated="2"/>
          <table:table-cell table:style-name="ce206" office:value-type="string" calcext:value-type="string">
            <text:p>Vulcanizado</text:p>
          </table:table-cell>
          <table:table-cell table:style-name="ce218" table:formula="of:=+[.O83]" office:value-type="float" office:value="706" calcext:value-type="float">
            <text:p>706</text:p>
          </table:table-cell>
          <table:table-cell table:style-name="ce218" table:formula="of:=+[.O84]" office:value-type="float" office:value="755" calcext:value-type="float">
            <text:p>755</text:p>
          </table:table-cell>
          <table:table-cell table:style-name="ce218" table:formula="of:=+[.O85]" office:value-type="float" office:value="808" calcext:value-type="float">
            <text:p>808</text:p>
          </table:table-cell>
          <table:table-cell table:style-name="ce218" table:formula="of:=+[.O86]" office:value-type="float" office:value="865" calcext:value-type="float">
            <text:p>865</text:p>
          </table:table-cell>
          <table:table-cell table:style-name="ce218" table:formula="of:=+[.O87]" office:value-type="float" office:value="926" calcext:value-type="float">
            <text:p>926</text:p>
          </table:table-cell>
          <table:table-cell table:style-name="ce218" table:formula="of:=+[.O88]" office:value-type="float" office:value="991" calcext:value-type="float">
            <text:p>991</text:p>
          </table:table-cell>
          <table:table-cell table:style-name="ce218" table:formula="of:=+[.O89]" office:value-type="float" office:value="1060" calcext:value-type="float">
            <text:p>1060</text:p>
          </table:table-cell>
          <table:table-cell table:style-name="ce218" table:formula="of:=+[.O90]" office:value-type="float" office:value="1134" calcext:value-type="float">
            <text:p>1134</text:p>
          </table:table-cell>
          <table:table-cell table:style-name="ce218" table:formula="of:=+[.O91]" office:value-type="float" office:value="1213" calcext:value-type="float">
            <text:p>1213</text:p>
          </table:table-cell>
          <table:table-cell table:style-name="ce218" table:formula="of:=+[.O92]" office:value-type="float" office:value="1298" calcext:value-type="float">
            <text:p>1298</text:p>
          </table:table-cell>
          <table:table-cell table:style-name="ce225" table:formula="of:=SUM([.D98:.M98])" office:value-type="float" office:value="9756" calcext:value-type="float">
            <text:p>9756</text:p>
          </table:table-cell>
          <table:table-cell table:number-columns-repeated="3"/>
          <table:table-cell table:style-name="ce206" office:value-type="string" calcext:value-type="string">
            <text:p>Vulcanizado</text:p>
          </table:table-cell>
          <table:table-cell table:style-name="ce218" table:formula="of:=+[.D98]*[$Resumen.$C$14]" office:value-type="float" office:value="10590" calcext:value-type="float">
            <text:p>10590</text:p>
          </table:table-cell>
          <table:table-cell table:style-name="ce218" table:formula="of:=+[.E98]*[$Resumen.$C$14]" office:value-type="float" office:value="11325" calcext:value-type="float">
            <text:p>11325</text:p>
          </table:table-cell>
          <table:table-cell table:style-name="ce218" table:formula="of:=+[.F98]*[$Resumen.$C$14]" office:value-type="float" office:value="12120" calcext:value-type="float">
            <text:p>12120</text:p>
          </table:table-cell>
          <table:table-cell table:style-name="ce218" table:formula="of:=+[.G98]*[$Resumen.$C$14]" office:value-type="float" office:value="12975" calcext:value-type="float">
            <text:p>12975</text:p>
          </table:table-cell>
          <table:table-cell table:style-name="ce218" table:formula="of:=+[.H98]*[$Resumen.$C$14]" office:value-type="float" office:value="13890" calcext:value-type="float">
            <text:p>13890</text:p>
          </table:table-cell>
          <table:table-cell table:style-name="ce218" table:formula="of:=+[.I98]*[$Resumen.$C$14]" office:value-type="float" office:value="14865" calcext:value-type="float">
            <text:p>14865</text:p>
          </table:table-cell>
          <table:table-cell table:style-name="ce218" table:formula="of:=+[.J98]*[$Resumen.$C$14]" office:value-type="float" office:value="15900" calcext:value-type="float">
            <text:p>15900</text:p>
          </table:table-cell>
          <table:table-cell table:style-name="ce218" table:formula="of:=+[.K98]*[$Resumen.$C$14]" office:value-type="float" office:value="17010" calcext:value-type="float">
            <text:p>17010</text:p>
          </table:table-cell>
          <table:table-cell table:style-name="ce218" table:formula="of:=+[.L98]*[$Resumen.$C$14]" office:value-type="float" office:value="18195" calcext:value-type="float">
            <text:p>18195</text:p>
          </table:table-cell>
          <table:table-cell table:style-name="ce218" table:formula="of:=+[.M98]*[$Resumen.$C$14]" office:value-type="float" office:value="19470" calcext:value-type="float">
            <text:p>19470</text:p>
          </table:table-cell>
          <table:table-cell table:style-name="ce225" table:formula="of:=SUM([.S98:.AB98])" office:value-type="float" office:value="146340" calcext:value-type="float">
            <text:p>146340</text:p>
          </table:table-cell>
          <table:table-cell table:number-columns-repeated="16355"/>
        </table:table-row>
        <table:table-row table:style-name="ro8" table:number-rows-repeated="3">
          <table:table-cell table:number-columns-repeated="16384"/>
        </table:table-row>
        <table:table-row table:style-name="ro8">
          <table:table-cell table:number-columns-repeated="9"/>
          <table:table-cell table:style-name="ce210" office:value-type="string" calcext:value-type="string" table:number-columns-spanned="14" table:number-rows-spanned="1">
            <text:p>VENTAS TOTALES MENSUALES EN SOLES</text:p>
          </table:table-cell>
          <table:covered-table-cell table:number-columns-repeated="13" table:style-name="ce210"/>
          <table:table-cell table:number-columns-repeated="16361"/>
        </table:table-row>
        <table:table-row table:style-name="ro8">
          <table:table-cell table:number-columns-repeated="9"/>
          <table:table-cell table:style-name="ce213" table:number-columns-repeated="14"/>
          <table:table-cell table:number-columns-repeated="16361"/>
        </table:table-row>
        <table:table-row table:style-name="ro8">
          <table:table-cell table:number-columns-repeated="9"/>
          <table:table-cell table:style-name="ce212" office:value-type="string" calcext:value-type="string">
            <text:p>Año</text:p>
          </table:table-cell>
          <table:table-cell table:style-name="ce212" office:value-type="string" calcext:value-type="string">
            <text:p>Mes 1</text:p>
          </table:table-cell>
          <table:table-cell table:style-name="ce212" office:value-type="string" calcext:value-type="string">
            <text:p>Mes 2</text:p>
          </table:table-cell>
          <table:table-cell table:style-name="ce212" office:value-type="string" calcext:value-type="string">
            <text:p>Mes 3</text:p>
          </table:table-cell>
          <table:table-cell table:style-name="ce212" office:value-type="string" calcext:value-type="string">
            <text:p>Mes 4</text:p>
          </table:table-cell>
          <table:table-cell table:style-name="ce212" office:value-type="string" calcext:value-type="string">
            <text:p>Mes 5</text:p>
          </table:table-cell>
          <table:table-cell table:style-name="ce212" office:value-type="string" calcext:value-type="string">
            <text:p>Mes 6</text:p>
          </table:table-cell>
          <table:table-cell table:style-name="ce212" office:value-type="string" calcext:value-type="string">
            <text:p>Mes 7</text:p>
          </table:table-cell>
          <table:table-cell table:style-name="ce212" office:value-type="string" calcext:value-type="string">
            <text:p>Mes 8</text:p>
          </table:table-cell>
          <table:table-cell table:style-name="ce212" office:value-type="string" calcext:value-type="string">
            <text:p>Mes 9</text:p>
          </table:table-cell>
          <table:table-cell table:style-name="ce212" office:value-type="string" calcext:value-type="string">
            <text:p>Mes 10</text:p>
          </table:table-cell>
          <table:table-cell table:style-name="ce212" office:value-type="string" calcext:value-type="string">
            <text:p>Mes 11</text:p>
          </table:table-cell>
          <table:table-cell table:style-name="ce212" office:value-type="string" calcext:value-type="string">
            <text:p>Mes 12</text:p>
          </table:table-cell>
          <table:table-cell table:style-name="ce212" office:value-type="string" calcext:value-type="string">
            <text:p>TOTAL</text:p>
          </table:table-cell>
          <table:table-cell table:number-columns-repeated="16361"/>
        </table:table-row>
        <table:table-row table:style-name="ro8">
          <table:table-cell table:number-columns-repeated="9"/>
          <table:table-cell table:style-name="ce221" office:value-type="float" office:value="1" calcext:value-type="float">
            <text:p>1</text:p>
          </table:table-cell>
          <table:table-cell table:style-name="ce222" table:formula="of:=+[.R83]+[.R58]" office:value-type="float" office:value="91338.0999271417" calcext:value-type="float">
            <text:p>91,338</text:p>
          </table:table-cell>
          <table:table-cell table:style-name="ce222" table:formula="of:=+[.S83]+[.S58]" office:value-type="float" office:value="92201.5221391382" calcext:value-type="float">
            <text:p>92,202</text:p>
          </table:table-cell>
          <table:table-cell table:style-name="ce222" table:formula="of:=+[.T83]+[.T58]" office:value-type="float" office:value="93511.6554571329" calcext:value-type="float">
            <text:p>93,512</text:p>
          </table:table-cell>
          <table:table-cell table:style-name="ce222" table:formula="of:=+[.U83]+[.U58]" office:value-type="float" office:value="93547.2716233777" calcext:value-type="float">
            <text:p>93,547</text:p>
          </table:table-cell>
          <table:table-cell table:style-name="ce222" table:formula="of:=+[.V83]+[.V58]" office:value-type="float" office:value="92244.261538632" calcext:value-type="float">
            <text:p>92,244</text:p>
          </table:table-cell>
          <table:table-cell table:style-name="ce222" table:formula="of:=+[.W83]+[.W58]" office:value-type="float" office:value="90714.7110510136" calcext:value-type="float">
            <text:p>90,715</text:p>
          </table:table-cell>
          <table:table-cell table:style-name="ce222" table:formula="of:=+[.X83]+[.X58]" office:value-type="float" office:value="165400.220279333" calcext:value-type="float">
            <text:p>165,400</text:p>
          </table:table-cell>
          <table:table-cell table:style-name="ce222" table:formula="of:=+[.Y83]+[.Y58]" office:value-type="float" office:value="98001.2311820948" calcext:value-type="float">
            <text:p>98,001</text:p>
          </table:table-cell>
          <table:table-cell table:style-name="ce222" table:formula="of:=+[.Z83]+[.Z58]" office:value-type="float" office:value="99311.3645000895" calcext:value-type="float">
            <text:p>99,311</text:p>
          </table:table-cell>
          <table:table-cell table:style-name="ce222" table:formula="of:=+[.AA83]+[.AA58]" office:value-type="float" office:value="99527.2200530886" calcext:value-type="float">
            <text:p>99,527</text:p>
          </table:table-cell>
          <table:table-cell table:style-name="ce222" table:formula="of:=+[.AB83]+[.AB58]" office:value-type="float" office:value="108693.084595423" calcext:value-type="float">
            <text:p>108,693</text:p>
          </table:table-cell>
          <table:table-cell table:style-name="ce222" table:formula="of:=+[.AC83]+[.AC58]" office:value-type="float" office:value="174109.442399298" calcext:value-type="float">
            <text:p>174,109</text:p>
          </table:table-cell>
          <table:table-cell table:style-name="ce233" table:formula="of:=SUM([.K105:.V105])" office:value-type="float" office:value="1298600.08474576" calcext:value-type="float">
            <text:p>1,298,600</text:p>
          </table:table-cell>
          <table:table-cell table:number-columns-repeated="16361"/>
        </table:table-row>
        <table:table-row table:style-name="ro8">
          <table:table-cell table:number-columns-repeated="9"/>
          <table:table-cell table:style-name="ce221" office:value-type="float" office:value="2" calcext:value-type="float">
            <text:p>2</text:p>
          </table:table-cell>
          <table:table-cell table:style-name="ce222" table:formula="of:=+[.R84]+[.R59]" office:value-type="float" office:value="101526.433218294" calcext:value-type="float">
            <text:p>101,526</text:p>
          </table:table-cell>
          <table:table-cell table:style-name="ce222" table:formula="of:=+[.S84]+[.S59]" office:value-type="float" office:value="102501.53456667" calcext:value-type="float">
            <text:p>102,502</text:p>
          </table:table-cell>
          <table:table-cell table:style-name="ce222" table:formula="of:=+[.T84]+[.T59]" office:value-type="float" office:value="103941.686589235" calcext:value-type="float">
            <text:p>103,942</text:p>
          </table:table-cell>
          <table:table-cell table:style-name="ce222" table:formula="of:=+[.U84]+[.U59]" office:value-type="float" office:value="103981.290769856" calcext:value-type="float">
            <text:p>103,981</text:p>
          </table:table-cell>
          <table:table-cell table:style-name="ce222" table:formula="of:=+[.V84]+[.V59]" office:value-type="float" office:value="102549.059583415" calcext:value-type="float">
            <text:p>102,549</text:p>
          </table:table-cell>
          <table:table-cell table:style-name="ce222" table:formula="of:=+[.W84]+[.W59]" office:value-type="float" office:value="100849.921805694" calcext:value-type="float">
            <text:p>100,850</text:p>
          </table:table-cell>
          <table:table-cell table:style-name="ce222" table:formula="of:=+[.X84]+[.X59]" office:value-type="float" office:value="183859.256191539" calcext:value-type="float">
            <text:p>183,859</text:p>
          </table:table-cell>
          <table:table-cell table:style-name="ce222" table:formula="of:=+[.Y84]+[.Y59]" office:value-type="float" office:value="108945.6100536" calcext:value-type="float">
            <text:p>108,946</text:p>
          </table:table-cell>
          <table:table-cell table:style-name="ce222" table:formula="of:=+[.Z84]+[.Z59]" office:value-type="float" office:value="110400.762076165" calcext:value-type="float">
            <text:p>110,401</text:p>
          </table:table-cell>
          <table:table-cell table:style-name="ce222" table:formula="of:=+[.AA84]+[.AA59]" office:value-type="float" office:value="110640.787413259" calcext:value-type="float">
            <text:p>110,641</text:p>
          </table:table-cell>
          <table:table-cell table:style-name="ce222" table:formula="of:=+[.AB84]+[.AB59]" office:value-type="float" office:value="120824.574497647" calcext:value-type="float">
            <text:p>120,825</text:p>
          </table:table-cell>
          <table:table-cell table:style-name="ce222" table:formula="of:=+[.AC84]+[.AC59]" office:value-type="float" office:value="193535.269675305" calcext:value-type="float">
            <text:p>193,535</text:p>
          </table:table-cell>
          <table:table-cell table:style-name="ce233" table:formula="of:=SUM([.K106:.V106])" office:value-type="float" office:value="1443556.18644068" calcext:value-type="float">
            <text:p>1,443,556</text:p>
          </table:table-cell>
          <table:table-cell table:number-columns-repeated="16361"/>
        </table:table-row>
        <table:table-row table:style-name="ro8">
          <table:table-cell table:number-columns-repeated="9"/>
          <table:table-cell table:style-name="ce221" office:value-type="float" office:value="3" calcext:value-type="float">
            <text:p>3</text:p>
          </table:table-cell>
          <table:table-cell table:style-name="ce222" table:formula="of:=+[.R85]+[.R60]" office:value-type="float" office:value="108637.633543574" calcext:value-type="float">
            <text:p>108,638</text:p>
          </table:table-cell>
          <table:table-cell table:style-name="ce222" table:formula="of:=+[.S85]+[.S60]" office:value-type="float" office:value="109664.941986337" calcext:value-type="float">
            <text:p>109,665</text:p>
          </table:table-cell>
          <table:table-cell table:style-name="ce222" table:formula="of:=+[.T85]+[.T60]" office:value-type="float" office:value="111220.904650482" calcext:value-type="float">
            <text:p>111,221</text:p>
          </table:table-cell>
          <table:table-cell table:style-name="ce222" table:formula="of:=+[.U85]+[.U60]" office:value-type="float" office:value="111263.281123746" calcext:value-type="float">
            <text:p>111,263</text:p>
          </table:table-cell>
          <table:table-cell table:style-name="ce222" table:formula="of:=+[.V85]+[.V60]" office:value-type="float" office:value="109715.793754254" calcext:value-type="float">
            <text:p>109,716</text:p>
          </table:table-cell>
          <table:table-cell table:style-name="ce222" table:formula="of:=+[.W85]+[.W60]" office:value-type="float" office:value="107898.766332093" calcext:value-type="float">
            <text:p>107,899</text:p>
          </table:table-cell>
          <table:table-cell table:style-name="ce222" table:formula="of:=+[.X85]+[.X60]" office:value-type="float" office:value="196733.604124947" calcext:value-type="float">
            <text:p>196,734</text:p>
          </table:table-cell>
          <table:table-cell table:style-name="ce222" table:formula="of:=+[.Y85]+[.Y60]" office:value-type="float" office:value="116571.952757352" calcext:value-type="float">
            <text:p>116,572</text:p>
          </table:table-cell>
          <table:table-cell table:style-name="ce222" table:formula="of:=+[.Z85]+[.Z60]" office:value-type="float" office:value="118127.915421496" calcext:value-type="float">
            <text:p>118,128</text:p>
          </table:table-cell>
          <table:table-cell table:style-name="ce222" table:formula="of:=+[.AA85]+[.AA60]" office:value-type="float" office:value="118384.742532187" calcext:value-type="float">
            <text:p>118,385</text:p>
          </table:table-cell>
          <table:table-cell table:style-name="ce222" table:formula="of:=+[.AB85]+[.AB60]" office:value-type="float" office:value="129291.144712482" calcext:value-type="float">
            <text:p>129,291</text:p>
          </table:table-cell>
          <table:table-cell table:style-name="ce222" table:formula="of:=+[.AC85]+[.AC60]" office:value-type="float" office:value="207081.688552576" calcext:value-type="float">
            <text:p>207,082</text:p>
          </table:table-cell>
          <table:table-cell table:style-name="ce233" table:formula="of:=SUM([.K107:.V107])" office:value-type="float" office:value="1544592.36949153" calcext:value-type="float">
            <text:p>1,544,592</text:p>
          </table:table-cell>
          <table:table-cell table:number-columns-repeated="16361"/>
        </table:table-row>
        <table:table-row table:style-name="ro8">
          <table:table-cell table:number-columns-repeated="9"/>
          <table:table-cell table:style-name="ce221" office:value-type="float" office:value="4" calcext:value-type="float">
            <text:p>4</text:p>
          </table:table-cell>
          <table:table-cell table:style-name="ce222" table:formula="of:=+[.R86]+[.R61]" office:value-type="float" office:value="116242.417891625" calcext:value-type="float">
            <text:p>116,242</text:p>
          </table:table-cell>
          <table:table-cell table:style-name="ce222" table:formula="of:=+[.S86]+[.S61]" office:value-type="float" office:value="117341.637925381" calcext:value-type="float">
            <text:p>117,342</text:p>
          </table:table-cell>
          <table:table-cell table:style-name="ce222" table:formula="of:=+[.T86]+[.T61]" office:value-type="float" office:value="119005.467976015" calcext:value-type="float">
            <text:p>119,005</text:p>
          </table:table-cell>
          <table:table-cell table:style-name="ce222" table:formula="of:=+[.U86]+[.U61]" office:value-type="float" office:value="119050.810802408" calcext:value-type="float">
            <text:p>119,051</text:p>
          </table:table-cell>
          <table:table-cell table:style-name="ce222" table:formula="of:=+[.V86]+[.V61]" office:value-type="float" office:value="117396.049317052" calcext:value-type="float">
            <text:p>117,396</text:p>
          </table:table-cell>
          <table:table-cell table:style-name="ce222" table:formula="of:=+[.W86]+[.W61]" office:value-type="float" office:value="115452.879975339" calcext:value-type="float">
            <text:p>115,453</text:p>
          </table:table-cell>
          <table:table-cell table:style-name="ce222" table:formula="of:=+[.X86]+[.X61]" office:value-type="float" office:value="210501.806413693" calcext:value-type="float">
            <text:p>210,502</text:p>
          </table:table-cell>
          <table:table-cell table:style-name="ce222" table:formula="of:=+[.Y86]+[.Y61]" office:value-type="float" office:value="124727.939450367" calcext:value-type="float">
            <text:p>124,728</text:p>
          </table:table-cell>
          <table:table-cell table:style-name="ce222" table:formula="of:=+[.Z86]+[.Z61]" office:value-type="float" office:value="126391.769501001" calcext:value-type="float">
            <text:p>126,392</text:p>
          </table:table-cell>
          <table:table-cell table:style-name="ce222" table:formula="of:=+[.AA86]+[.AA61]" office:value-type="float" office:value="126666.57450944" calcext:value-type="float">
            <text:p>126,667</text:p>
          </table:table-cell>
          <table:table-cell table:style-name="ce222" table:formula="of:=+[.AB86]+[.AB61]" office:value-type="float" office:value="138330.124842356" calcext:value-type="float">
            <text:p>138,330</text:p>
          </table:table-cell>
          <table:table-cell table:style-name="ce222" table:formula="of:=+[.AC86]+[.AC61]" office:value-type="float" office:value="221584.006751256" calcext:value-type="float">
            <text:p>221,584</text:p>
          </table:table-cell>
          <table:table-cell table:style-name="ce233" table:formula="of:=SUM([.K108:.V108])" office:value-type="float" office:value="1652691.48535593" calcext:value-type="float">
            <text:p>1,652,691</text:p>
          </table:table-cell>
          <table:table-cell table:number-columns-repeated="16361"/>
        </table:table-row>
        <table:table-row table:style-name="ro8">
          <table:table-cell table:number-columns-repeated="9"/>
          <table:table-cell table:style-name="ce221" office:value-type="float" office:value="5" calcext:value-type="float">
            <text:p>5</text:p>
          </table:table-cell>
          <table:table-cell table:style-name="ce222" table:formula="of:=+[.R87]+[.R62]" office:value-type="float" office:value="124375.337144038" calcext:value-type="float">
            <text:p>124,375</text:p>
          </table:table-cell>
          <table:table-cell table:style-name="ce222" table:formula="of:=+[.S87]+[.S62]" office:value-type="float" office:value="125566.502580158" calcext:value-type="float">
            <text:p>125,567</text:p>
          </table:table-cell>
          <table:table-cell table:style-name="ce222" table:formula="of:=+[.T87]+[.T62]" office:value-type="float" office:value="127345.750734336" calcext:value-type="float">
            <text:p>127,346</text:p>
          </table:table-cell>
          <table:table-cell table:style-name="ce222" table:formula="of:=+[.U87]+[.U62]" office:value-type="float" office:value="127394.267558576" calcext:value-type="float">
            <text:p>127,394</text:p>
          </table:table-cell>
          <table:table-cell table:style-name="ce222" table:formula="of:=+[.V87]+[.V62]" office:value-type="float" office:value="125624.722769245" calcext:value-type="float">
            <text:p>125,625</text:p>
          </table:table-cell>
          <table:table-cell table:style-name="ce222" table:formula="of:=+[.W87]+[.W62]" office:value-type="float" office:value="123546.581573613" calcext:value-type="float">
            <text:p>123,547</text:p>
          </table:table-cell>
          <table:table-cell table:style-name="ce222" table:formula="of:=+[.X87]+[.X62]" office:value-type="float" office:value="225241.432862652" calcext:value-type="float">
            <text:p>225,241</text:p>
          </table:table-cell>
          <table:table-cell table:style-name="ce222" table:formula="of:=+[.Y87]+[.Y62]" office:value-type="float" office:value="133465.645211892" calcext:value-type="float">
            <text:p>133,466</text:p>
          </table:table-cell>
          <table:table-cell table:style-name="ce222" table:formula="of:=+[.Z87]+[.Z62]" office:value-type="float" office:value="135244.893366071" calcext:value-type="float">
            <text:p>135,245</text:p>
          </table:table-cell>
          <table:table-cell table:style-name="ce222" table:formula="of:=+[.AA87]+[.AA62]" office:value-type="float" office:value="135538.934725101" calcext:value-type="float">
            <text:p>135,539</text:p>
          </table:table-cell>
          <table:table-cell table:style-name="ce222" table:formula="of:=+[.AB87]+[.AB62]" office:value-type="float" office:value="148027.63358132" calcext:value-type="float">
            <text:p>148,028</text:p>
          </table:table-cell>
          <table:table-cell table:style-name="ce222" table:formula="of:=+[.AC87]+[.AC62]" office:value-type="float" office:value="237093.087223844" calcext:value-type="float">
            <text:p>237,093</text:p>
          </table:table-cell>
          <table:table-cell table:style-name="ce233" table:formula="of:=SUM([.K109:.V109])" office:value-type="float" office:value="1768464.78933085" calcext:value-type="float">
            <text:p>1,768,465</text:p>
          </table:table-cell>
          <table:table-cell table:number-columns-repeated="16361"/>
        </table:table-row>
        <table:table-row table:style-name="ro8">
          <table:table-cell table:number-columns-repeated="9"/>
          <table:table-cell table:style-name="ce221" office:value-type="float" office:value="6" calcext:value-type="float">
            <text:p>6</text:p>
          </table:table-cell>
          <table:table-cell table:style-name="ce222" table:formula="of:=+[.R88]+[.R63]" office:value-type="float" office:value="133088.360744121" calcext:value-type="float">
            <text:p>133,088</text:p>
          </table:table-cell>
          <table:table-cell table:style-name="ce222" table:formula="of:=+[.S88]+[.S63]" office:value-type="float" office:value="134346.857760769" calcext:value-type="float">
            <text:p>134,347</text:p>
          </table:table-cell>
          <table:table-cell table:style-name="ce222" table:formula="of:=+[.T88]+[.T63]" office:value-type="float" office:value="136249.60328574" calcext:value-type="float">
            <text:p>136,250</text:p>
          </table:table-cell>
          <table:table-cell table:style-name="ce222" table:formula="of:=+[.U88]+[.U63]" office:value-type="float" office:value="136301.516287677" calcext:value-type="float">
            <text:p>136,302</text:p>
          </table:table-cell>
          <table:table-cell table:style-name="ce222" table:formula="of:=+[.V88]+[.V63]" office:value-type="float" office:value="134409.153363093" calcext:value-type="float">
            <text:p>134,409</text:p>
          </table:table-cell>
          <table:table-cell table:style-name="ce222" table:formula="of:=+[.W88]+[.W63]" office:value-type="float" office:value="132186.592283766" calcext:value-type="float">
            <text:p>132,187</text:p>
          </table:table-cell>
          <table:table-cell table:style-name="ce222" table:formula="of:=+[.X88]+[.X63]" office:value-type="float" office:value="241004.433163038" calcext:value-type="float">
            <text:p>241,004</text:p>
          </table:table-cell>
          <table:table-cell table:style-name="ce222" table:formula="of:=+[.Y88]+[.Y63]" office:value-type="float" office:value="142809.740376725" calcext:value-type="float">
            <text:p>142,810</text:p>
          </table:table-cell>
          <table:table-cell table:style-name="ce222" table:formula="of:=+[.Z88]+[.Z63]" office:value-type="float" office:value="144712.485901696" calcext:value-type="float">
            <text:p>144,712</text:p>
          </table:table-cell>
          <table:table-cell table:style-name="ce222" table:formula="of:=+[.AA88]+[.AA63]" office:value-type="float" office:value="145027.110155858" calcext:value-type="float">
            <text:p>145,027</text:p>
          </table:table-cell>
          <table:table-cell table:style-name="ce222" table:formula="of:=+[.AB88]+[.AB63]" office:value-type="float" office:value="158382.667932013" calcext:value-type="float">
            <text:p>158,383</text:p>
          </table:table-cell>
          <table:table-cell table:style-name="ce222" table:formula="of:=+[.AC88]+[.AC63]" office:value-type="float" office:value="253694.403329513" calcext:value-type="float">
            <text:p>253,694</text:p>
          </table:table-cell>
          <table:table-cell table:style-name="ce233" table:formula="of:=SUM([.K110:.V110])" office:value-type="float" office:value="1892212.92458401" calcext:value-type="float">
            <text:p>1,892,213</text:p>
          </table:table-cell>
          <table:table-cell table:number-columns-repeated="16361"/>
        </table:table-row>
        <table:table-row table:style-name="ro8">
          <table:table-cell table:number-columns-repeated="9"/>
          <table:table-cell table:style-name="ce221" office:value-type="float" office:value="7" calcext:value-type="float">
            <text:p>7</text:p>
          </table:table-cell>
          <table:table-cell table:style-name="ce222" table:formula="of:=+[.R89]+[.R64]" office:value-type="float" office:value="142406.04599621" calcext:value-type="float">
            <text:p>142,406</text:p>
          </table:table-cell>
          <table:table-cell table:style-name="ce222" table:formula="of:=+[.S89]+[.S64]" office:value-type="float" office:value="143752.637804022" calcext:value-type="float">
            <text:p>143,753</text:p>
          </table:table-cell>
          <table:table-cell table:style-name="ce222" table:formula="of:=+[.T89]+[.T64]" office:value-type="float" office:value="145787.525515742" calcext:value-type="float">
            <text:p>145,788</text:p>
          </table:table-cell>
          <table:table-cell table:style-name="ce222" table:formula="of:=+[.U89]+[.U64]" office:value-type="float" office:value="145843.072427814" calcext:value-type="float">
            <text:p>145,843</text:p>
          </table:table-cell>
          <table:table-cell table:style-name="ce222" table:formula="of:=+[.V89]+[.V64]" office:value-type="float" office:value="143819.294098509" calcext:value-type="float">
            <text:p>143,819</text:p>
          </table:table-cell>
          <table:table-cell table:style-name="ce222" table:formula="of:=+[.W89]+[.W64]" office:value-type="float" office:value="141442.203743629" calcext:value-type="float">
            <text:p>141,442</text:p>
          </table:table-cell>
          <table:table-cell table:style-name="ce222" table:formula="of:=+[.X89]+[.X64]" office:value-type="float" office:value="257877.44348445" calcext:value-type="float">
            <text:p>257,877</text:p>
          </table:table-cell>
          <table:table-cell table:style-name="ce222" table:formula="of:=+[.Y89]+[.Y64]" office:value-type="float" office:value="152802.672203095" calcext:value-type="float">
            <text:p>152,803</text:p>
          </table:table-cell>
          <table:table-cell table:style-name="ce222" table:formula="of:=+[.Z89]+[.Z64]" office:value-type="float" office:value="154837.559914815" calcext:value-type="float">
            <text:p>154,838</text:p>
          </table:table-cell>
          <table:table-cell table:style-name="ce222" table:formula="of:=+[.AA89]+[.AA64]" office:value-type="float" office:value="155174.207866768" calcext:value-type="float">
            <text:p>155,174</text:p>
          </table:table-cell>
          <table:table-cell table:style-name="ce222" table:formula="of:=+[.AB89]+[.AB64]" office:value-type="float" office:value="169472.304687254" calcext:value-type="float">
            <text:p>169,472</text:p>
          </table:table-cell>
          <table:table-cell table:style-name="ce222" table:formula="of:=+[.AC89]+[.AC64]" office:value-type="float" office:value="271448.361562579" calcext:value-type="float">
            <text:p>271,448</text:p>
          </table:table-cell>
          <table:table-cell table:style-name="ce233" table:formula="of:=SUM([.K111:.V111])" office:value-type="float" office:value="2024663.32930489" calcext:value-type="float">
            <text:p>2,024,663</text:p>
          </table:table-cell>
          <table:table-cell table:number-columns-repeated="16361"/>
        </table:table-row>
        <table:table-row table:style-name="ro8">
          <table:table-cell table:number-columns-repeated="9"/>
          <table:table-cell table:style-name="ce221" office:value-type="float" office:value="8" calcext:value-type="float">
            <text:p>8</text:p>
          </table:table-cell>
          <table:table-cell table:style-name="ce222" table:formula="of:=+[.R90]+[.R65]" office:value-type="float" office:value="152370.719215944" calcext:value-type="float">
            <text:p>152,371</text:p>
          </table:table-cell>
          <table:table-cell table:style-name="ce222" table:formula="of:=+[.S90]+[.S65]" office:value-type="float" office:value="153826.572450304" calcext:value-type="float">
            <text:p>153,827</text:p>
          </table:table-cell>
          <table:table-cell table:style-name="ce222" table:formula="of:=+[.T90]+[.T65]" office:value-type="float" office:value="156002.852301844" calcext:value-type="float">
            <text:p>156,003</text:p>
          </table:table-cell>
          <table:table-cell table:style-name="ce222" table:formula="of:=+[.U90]+[.U65]" office:value-type="float" office:value="156062.287497761" calcext:value-type="float">
            <text:p>156,062</text:p>
          </table:table-cell>
          <table:table-cell table:style-name="ce222" table:formula="of:=+[.V90]+[.V65]" office:value-type="float" office:value="153897.894685405" calcext:value-type="float">
            <text:p>153,898</text:p>
          </table:table-cell>
          <table:table-cell table:style-name="ce222" table:formula="of:=+[.W90]+[.W65]" office:value-type="float" office:value="151340.458005683" calcext:value-type="float">
            <text:p>151,340</text:p>
          </table:table-cell>
          <table:table-cell table:style-name="ce222" table:formula="of:=+[.X90]+[.X65]" office:value-type="float" office:value="275922.114528362" calcext:value-type="float">
            <text:p>275,922</text:p>
          </table:table-cell>
          <table:table-cell table:style-name="ce222" table:formula="of:=+[.Y90]+[.Y65]" office:value-type="float" office:value="163504.859257312" calcext:value-type="float">
            <text:p>163,505</text:p>
          </table:table-cell>
          <table:table-cell table:style-name="ce222" table:formula="of:=+[.Z90]+[.Z65]" office:value-type="float" office:value="165681.139108852" calcext:value-type="float">
            <text:p>165,681</text:p>
          </table:table-cell>
          <table:table-cell table:style-name="ce222" table:formula="of:=+[.AA90]+[.AA65]" office:value-type="float" office:value="166041.352417442" calcext:value-type="float">
            <text:p>166,041</text:p>
          </table:table-cell>
          <table:table-cell table:style-name="ce222" table:formula="of:=+[.AB90]+[.AB65]" office:value-type="float" office:value="181331.916015362" calcext:value-type="float">
            <text:p>181,332</text:p>
          </table:table-cell>
          <table:table-cell table:style-name="ce222" table:formula="of:=+[.AC90]+[.AC65]" office:value-type="float" office:value="290450.64687196" calcext:value-type="float">
            <text:p>290,451</text:p>
          </table:table-cell>
          <table:table-cell table:style-name="ce233" table:formula="of:=SUM([.K112:.V112])" office:value-type="float" office:value="2166432.81235623" calcext:value-type="float">
            <text:p>2,166,433</text:p>
          </table:table-cell>
          <table:table-cell table:number-columns-repeated="16361"/>
        </table:table-row>
        <table:table-row table:style-name="ro8">
          <table:table-cell table:number-columns-repeated="9"/>
          <table:table-cell table:style-name="ce221" office:value-type="float" office:value="9" calcext:value-type="float">
            <text:p>9</text:p>
          </table:table-cell>
          <table:table-cell table:style-name="ce222" table:formula="of:=+[.R91]+[.R66]" office:value-type="float" office:value="163027.66956106" calcext:value-type="float">
            <text:p>163,028</text:p>
          </table:table-cell>
          <table:table-cell table:style-name="ce222" table:formula="of:=+[.S91]+[.S66]" office:value-type="float" office:value="164584.382521825" calcext:value-type="float">
            <text:p>164,584</text:p>
          </table:table-cell>
          <table:table-cell table:style-name="ce222" table:formula="of:=+[.T91]+[.T66]" office:value-type="float" office:value="166911.951962973" calcext:value-type="float">
            <text:p>166,912</text:p>
          </table:table-cell>
          <table:table-cell table:style-name="ce222" table:formula="of:=+[.U91]+[.U66]" office:value-type="float" office:value="166975.547622604" calcext:value-type="float">
            <text:p>166,976</text:p>
          </table:table-cell>
          <table:table-cell table:style-name="ce222" table:formula="of:=+[.V91]+[.V66]" office:value-type="float" office:value="164660.697313383" calcext:value-type="float">
            <text:p>164,661</text:p>
          </table:table-cell>
          <table:table-cell table:style-name="ce222" table:formula="of:=+[.W91]+[.W66]" office:value-type="float" office:value="161941.340066081" calcext:value-type="float">
            <text:p>161,941</text:p>
          </table:table-cell>
          <table:table-cell table:style-name="ce222" table:formula="of:=+[.X91]+[.X66]" office:value-type="float" office:value="295235.462545347" calcext:value-type="float">
            <text:p>295,235</text:p>
          </table:table-cell>
          <table:table-cell table:style-name="ce222" table:formula="of:=+[.Y91]+[.Y66]" office:value-type="float" office:value="174949.899405324" calcext:value-type="float">
            <text:p>174,950</text:p>
          </table:table-cell>
          <table:table-cell table:style-name="ce222" table:formula="of:=+[.Z91]+[.Z66]" office:value-type="float" office:value="177277.468846471" calcext:value-type="float">
            <text:p>177,277</text:p>
          </table:table-cell>
          <table:table-cell table:style-name="ce222" table:formula="of:=+[.AA91]+[.AA66]" office:value-type="float" office:value="177662.897086663" calcext:value-type="float">
            <text:p>177,663</text:p>
          </table:table-cell>
          <table:table-cell table:style-name="ce222" table:formula="of:=+[.AB91]+[.AB66]" office:value-type="float" office:value="194030.400136437" calcext:value-type="float">
            <text:p>194,030</text:p>
          </table:table-cell>
          <table:table-cell table:style-name="ce222" table:formula="of:=+[.AC91]+[.AC66]" office:value-type="float" office:value="310787.592152997" calcext:value-type="float">
            <text:p>310,788</text:p>
          </table:table-cell>
          <table:table-cell table:style-name="ce233" table:formula="of:=SUM([.K113:.V113])" office:value-type="float" office:value="2318045.30922117" calcext:value-type="float">
            <text:p>2,318,045</text:p>
          </table:table-cell>
          <table:table-cell table:number-columns-repeated="16361"/>
        </table:table-row>
        <table:table-row table:style-name="ro8">
          <table:table-cell table:number-columns-repeated="9"/>
          <table:table-cell table:style-name="ce221" office:value-type="float" office:value="10" calcext:value-type="float">
            <text:p>10</text:p>
          </table:table-cell>
          <table:table-cell table:style-name="ce222" table:formula="of:=+[.R92]+[.R67]" office:value-type="float" office:value="174440.356430335" calcext:value-type="float">
            <text:p>174,440</text:p>
          </table:table-cell>
          <table:table-cell table:style-name="ce222" table:formula="of:=+[.S92]+[.S67]" office:value-type="float" office:value="176104.989298353" calcext:value-type="float">
            <text:p>176,105</text:p>
          </table:table-cell>
          <table:table-cell table:style-name="ce222" table:formula="of:=+[.T92]+[.T67]" office:value-type="float" office:value="178594.438600381" calcext:value-type="float">
            <text:p>178,594</text:p>
          </table:table-cell>
          <table:table-cell table:style-name="ce222" table:formula="of:=+[.U92]+[.U67]" office:value-type="float" office:value="178677.485956187" calcext:value-type="float">
            <text:p>178,677</text:p>
          </table:table-cell>
          <table:table-cell table:style-name="ce222" table:formula="of:=+[.V92]+[.V67]" office:value-type="float" office:value="176186.64612532" calcext:value-type="float">
            <text:p>176,187</text:p>
          </table:table-cell>
          <table:table-cell table:style-name="ce222" table:formula="of:=+[.W92]+[.W67]" office:value-type="float" office:value="173277.983870707" calcext:value-type="float">
            <text:p>173,278</text:p>
          </table:table-cell>
          <table:table-cell table:style-name="ce222" table:formula="of:=+[.X92]+[.X67]" office:value-type="float" office:value="315905.244923522" calcext:value-type="float">
            <text:p>315,905</text:p>
          </table:table-cell>
          <table:table-cell table:style-name="ce222" table:formula="of:=+[.Y92]+[.Y67]" office:value-type="float" office:value="187189.792363697" calcext:value-type="float">
            <text:p>187,190</text:p>
          </table:table-cell>
          <table:table-cell table:style-name="ce222" table:formula="of:=+[.Z92]+[.Z67]" office:value-type="float" office:value="189679.241665724" calcext:value-type="float">
            <text:p>189,679</text:p>
          </table:table-cell>
          <table:table-cell table:style-name="ce222" table:formula="of:=+[.AA92]+[.AA67]" office:value-type="float" office:value="190091.649882729" calcext:value-type="float">
            <text:p>190,092</text:p>
          </table:table-cell>
          <table:table-cell table:style-name="ce222" table:formula="of:=+[.AB92]+[.AB67]" office:value-type="float" office:value="207610.428145987" calcext:value-type="float">
            <text:p>207,610</text:p>
          </table:table-cell>
          <table:table-cell table:style-name="ce222" table:formula="of:=+[.AC92]+[.AC67]" office:value-type="float" office:value="332536.573603707" calcext:value-type="float">
            <text:p>332,537</text:p>
          </table:table-cell>
          <table:table-cell table:style-name="ce233" table:formula="of:=SUM([.K114:.V114])" office:value-type="float" office:value="2480294.83086665" calcext:value-type="float">
            <text:p>2,480,295</text:p>
          </table:table-cell>
          <table:table-cell table:number-columns-repeated="16361"/>
        </table:table-row>
        <table:table-row table:style-name="ro8" table:number-rows-repeated="3">
          <table:table-cell table:number-columns-repeated="16384"/>
        </table:table-row>
        <table:table-row table:style-name="ro8">
          <table:table-cell table:number-columns-repeated="10"/>
          <table:table-cell table:style-name="ce207" office:value-type="string" calcext:value-type="string" table:number-columns-spanned="12" table:number-rows-spanned="1">
            <text:p>VENTAS TOTALES ANUALES EN SOLES</text:p>
          </table:table-cell>
          <table:covered-table-cell table:number-columns-repeated="11" table:style-name="ce215"/>
          <table:table-cell table:number-columns-repeated="16362"/>
        </table:table-row>
        <table:table-row table:style-name="ro8">
          <table:table-cell table:number-columns-repeated="16384"/>
        </table:table-row>
        <table:table-row table:style-name="ro8">
          <table:table-cell table:number-columns-repeated="10"/>
          <table:table-cell table:style-name="ce212" office:value-type="string" calcext:value-type="string">
            <text:p>Producto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3" calcext:value-type="float">
            <text:p>3</text:p>
          </table:table-cell>
          <table:table-cell table:style-name="ce212" office:value-type="float" office:value="4" calcext:value-type="float">
            <text:p>4</text:p>
          </table:table-cell>
          <table:table-cell table:style-name="ce212" office:value-type="float" office:value="5" calcext:value-type="float">
            <text:p>5</text:p>
          </table:table-cell>
          <table:table-cell table:style-name="ce212" office:value-type="float" office:value="6" calcext:value-type="float">
            <text:p>6</text:p>
          </table:table-cell>
          <table:table-cell table:style-name="ce212" office:value-type="float" office:value="7" calcext:value-type="float">
            <text:p>7</text:p>
          </table:table-cell>
          <table:table-cell table:style-name="ce212" office:value-type="float" office:value="8" calcext:value-type="float">
            <text:p>8</text:p>
          </table:table-cell>
          <table:table-cell table:style-name="ce212" office:value-type="float" office:value="9" calcext:value-type="float">
            <text:p>9</text:p>
          </table:table-cell>
          <table:table-cell table:style-name="ce212" office:value-type="float" office:value="10" calcext:value-type="float">
            <text:p>10</text:p>
          </table:table-cell>
          <table:table-cell table:style-name="ce223" office:value-type="string" calcext:value-type="string">
            <text:p>TOTALES</text:p>
          </table:table-cell>
          <table:table-cell table:number-columns-repeated="16362"/>
        </table:table-row>
        <table:table-row table:style-name="ro8">
          <table:table-cell table:number-columns-repeated="10"/>
          <table:table-cell table:style-name="ce206" office:value-type="string" calcext:value-type="string">
            <text:p>DB5</text:p>
          </table:table-cell>
          <table:table-cell table:style-name="ce218" table:formula="of:=+[.S73]" office:value-type="float" office:value="660508.474576271" calcext:value-type="float">
            <text:p>660508</text:p>
          </table:table-cell>
          <table:table-cell table:style-name="ce218" table:formula="of:=+[.T73]" office:value-type="float" office:value="715550.847457627" calcext:value-type="float">
            <text:p>715551</text:p>
          </table:table-cell>
          <table:table-cell table:style-name="ce218" table:formula="of:=+[.U73]" office:value-type="float" office:value="765639.406779661" calcext:value-type="float">
            <text:p>765639</text:p>
          </table:table-cell>
          <table:table-cell table:style-name="ce218" table:formula="of:=+[.V73]" office:value-type="float" office:value="819234.165254237" calcext:value-type="float">
            <text:p>819234</text:p>
          </table:table-cell>
          <table:table-cell table:style-name="ce218" table:formula="of:=+[.W73]" office:value-type="float" office:value="876580.556822034" calcext:value-type="float">
            <text:p>876581</text:p>
          </table:table-cell>
          <table:table-cell table:style-name="ce218" table:formula="of:=+[.X73]" office:value-type="float" office:value="937941.195799576" calcext:value-type="float">
            <text:p>937941</text:p>
          </table:table-cell>
          <table:table-cell table:style-name="ce218" table:formula="of:=+[.Y73]" office:value-type="float" office:value="1003597.07950555" calcext:value-type="float">
            <text:p>1003597</text:p>
          </table:table-cell>
          <table:table-cell table:style-name="ce218" table:formula="of:=+[.Z73]" office:value-type="float" office:value="1073848.87507094" calcext:value-type="float">
            <text:p>1073849</text:p>
          </table:table-cell>
          <table:table-cell table:style-name="ce218" table:formula="of:=+[.AA73]" office:value-type="float" office:value="1149018.2963259" calcext:value-type="float">
            <text:p>1149018</text:p>
          </table:table-cell>
          <table:table-cell table:style-name="ce218" table:formula="of:=+[.AB73]" office:value-type="float" office:value="1229449.57706871" calcext:value-type="float">
            <text:p>1229450</text:p>
          </table:table-cell>
          <table:table-cell table:style-name="ce225" table:formula="of:=SUM([.L121:.U121])" office:value-type="float" office:value="9231368.47466051" calcext:value-type="float">
            <text:p>9231368</text:p>
          </table:table-cell>
          <table:table-cell table:number-columns-repeated="16362"/>
        </table:table-row>
        <table:table-row table:style-name="ro8">
          <table:table-cell table:number-columns-repeated="10"/>
          <table:table-cell table:style-name="ce206" office:value-type="string" calcext:value-type="string">
            <text:p>G90</text:p>
          </table:table-cell>
          <table:table-cell table:style-name="ce218" table:formula="of:=+[.S74]" office:value-type="float" office:value="497059.322033898" calcext:value-type="float">
            <text:p>497059</text:p>
          </table:table-cell>
          <table:table-cell table:style-name="ce218" table:formula="of:=+[.T74]" office:value-type="float" office:value="574379.661016949" calcext:value-type="float">
            <text:p>574380</text:p>
          </table:table-cell>
          <table:table-cell table:style-name="ce218" table:formula="of:=+[.U74]" office:value-type="float" office:value="614586.237288136" calcext:value-type="float">
            <text:p>614586</text:p>
          </table:table-cell>
          <table:table-cell table:style-name="ce218" table:formula="of:=+[.V74]" office:value-type="float" office:value="657607.273898305" calcext:value-type="float">
            <text:p>657607</text:p>
          </table:table-cell>
          <table:table-cell table:style-name="ce218" table:formula="of:=+[.W74]" office:value-type="float" office:value="703639.783071187" calcext:value-type="float">
            <text:p>703640</text:p>
          </table:table-cell>
          <table:table-cell table:style-name="ce218" table:formula="of:=+[.X74]" office:value-type="float" office:value="752894.56788617" calcext:value-type="float">
            <text:p>752895</text:p>
          </table:table-cell>
          <table:table-cell table:style-name="ce218" table:formula="of:=+[.Y74]" office:value-type="float" office:value="805597.187638202" calcext:value-type="float">
            <text:p>805597</text:p>
          </table:table-cell>
          <table:table-cell table:style-name="ce218" table:formula="of:=+[.Z74]" office:value-type="float" office:value="861988.990772876" calcext:value-type="float">
            <text:p>861989</text:p>
          </table:table-cell>
          <table:table-cell table:style-name="ce218" table:formula="of:=+[.AA74]" office:value-type="float" office:value="922328.220126977" calcext:value-type="float">
            <text:p>922328</text:p>
          </table:table-cell>
          <table:table-cell table:style-name="ce218" table:formula="of:=+[.AB74]" office:value-type="float" office:value="986891.195535866" calcext:value-type="float">
            <text:p>986891</text:p>
          </table:table-cell>
          <table:table-cell table:style-name="ce225" table:formula="of:=SUM([.L122:.U122])" office:value-type="float" office:value="7376972.43926857" calcext:value-type="float">
            <text:p>7376972</text:p>
          </table:table-cell>
          <table:table-cell table:number-columns-repeated="16362"/>
        </table:table-row>
        <table:table-row table:style-name="ro8">
          <table:table-cell table:number-columns-repeated="10"/>
          <table:table-cell table:style-name="ce206" office:value-type="string" calcext:value-type="string">
            <text:p>G95</text:p>
          </table:table-cell>
          <table:table-cell table:style-name="ce218" table:formula="of:=+[.S75]" office:value-type="float" office:value="130442.288135593" calcext:value-type="float">
            <text:p>130442</text:p>
          </table:table-cell>
          <table:table-cell table:style-name="ce218" table:formula="of:=+[.T75]" office:value-type="float" office:value="142300.677966102" calcext:value-type="float">
            <text:p>142301</text:p>
          </table:table-cell>
          <table:table-cell table:style-name="ce218" table:formula="of:=+[.U75]" office:value-type="float" office:value="152261.725423729" calcext:value-type="float">
            <text:p>152262</text:p>
          </table:table-cell>
          <table:table-cell table:style-name="ce218" table:formula="of:=+[.V75]" office:value-type="float" office:value="162920.04620339" calcext:value-type="float">
            <text:p>162920</text:p>
          </table:table-cell>
          <table:table-cell table:style-name="ce218" table:formula="of:=+[.W75]" office:value-type="float" office:value="174324.449437627" calcext:value-type="float">
            <text:p>174324</text:p>
          </table:table-cell>
          <table:table-cell table:style-name="ce218" table:formula="of:=+[.X75]" office:value-type="float" office:value="186527.160898261" calcext:value-type="float">
            <text:p>186527</text:p>
          </table:table-cell>
          <table:table-cell table:style-name="ce218" table:formula="of:=+[.Y75]" office:value-type="float" office:value="199584.062161139" calcext:value-type="float">
            <text:p>199584</text:p>
          </table:table-cell>
          <table:table-cell table:style-name="ce218" table:formula="of:=+[.Z75]" office:value-type="float" office:value="213554.946512419" calcext:value-type="float">
            <text:p>213555</text:p>
          </table:table-cell>
          <table:table-cell table:style-name="ce218" table:formula="of:=+[.AA75]" office:value-type="float" office:value="228503.792768288" calcext:value-type="float">
            <text:p>228504</text:p>
          </table:table-cell>
          <table:table-cell table:style-name="ce218" table:formula="of:=+[.AB75]" office:value-type="float" office:value="244499.058262069" calcext:value-type="float">
            <text:p>244499</text:p>
          </table:table-cell>
          <table:table-cell table:style-name="ce225" table:formula="of:=SUM([.L123:.U123])" office:value-type="float" office:value="1834918.20776862" calcext:value-type="float">
            <text:p>1834918</text:p>
          </table:table-cell>
          <table:table-cell table:number-columns-repeated="16362"/>
        </table:table-row>
        <table:table-row table:style-name="ro8">
          <table:table-cell table:number-columns-repeated="10"/>
          <table:table-cell table:style-name="ce206" office:value-type="string" calcext:value-type="string">
            <text:p>Vulcanizado</text:p>
          </table:table-cell>
          <table:table-cell table:style-name="ce218" table:formula="of:=+[.S98]" office:value-type="float" office:value="10590" calcext:value-type="float">
            <text:p>10590</text:p>
          </table:table-cell>
          <table:table-cell table:style-name="ce218" table:formula="of:=+[.T98]" office:value-type="float" office:value="11325" calcext:value-type="float">
            <text:p>11325</text:p>
          </table:table-cell>
          <table:table-cell table:style-name="ce218" table:formula="of:=+[.U98]" office:value-type="float" office:value="12120" calcext:value-type="float">
            <text:p>12120</text:p>
          </table:table-cell>
          <table:table-cell table:style-name="ce218" table:formula="of:=+[.V98]" office:value-type="float" office:value="12975" calcext:value-type="float">
            <text:p>12975</text:p>
          </table:table-cell>
          <table:table-cell table:style-name="ce218" table:formula="of:=+[.W98]" office:value-type="float" office:value="13890" calcext:value-type="float">
            <text:p>13890</text:p>
          </table:table-cell>
          <table:table-cell table:style-name="ce218" table:formula="of:=+[.X98]" office:value-type="float" office:value="14865" calcext:value-type="float">
            <text:p>14865</text:p>
          </table:table-cell>
          <table:table-cell table:style-name="ce218" table:formula="of:=+[.Y98]" office:value-type="float" office:value="15900" calcext:value-type="float">
            <text:p>15900</text:p>
          </table:table-cell>
          <table:table-cell table:style-name="ce218" table:formula="of:=+[.Z98]" office:value-type="float" office:value="17010" calcext:value-type="float">
            <text:p>17010</text:p>
          </table:table-cell>
          <table:table-cell table:style-name="ce218" table:formula="of:=+[.AA98]" office:value-type="float" office:value="18195" calcext:value-type="float">
            <text:p>18195</text:p>
          </table:table-cell>
          <table:table-cell table:style-name="ce218" table:formula="of:=+[.AB98]" office:value-type="float" office:value="19470" calcext:value-type="float">
            <text:p>19470</text:p>
          </table:table-cell>
          <table:table-cell table:style-name="ce225" table:formula="of:=SUM([.L124:.U124])" office:value-type="float" office:value="146340" calcext:value-type="float">
            <text:p>146340</text:p>
          </table:table-cell>
          <table:table-cell table:number-columns-repeated="16362"/>
        </table:table-row>
        <table:table-row table:style-name="ro8">
          <table:table-cell table:number-columns-repeated="10"/>
          <table:table-cell table:style-name="ce223" office:value-type="string" calcext:value-type="string">
            <text:p>Total</text:p>
          </table:table-cell>
          <table:table-cell table:style-name="ce224" table:formula="of:=SUM([.L120:.L124])" office:value-type="float" office:value="1298601.08474576" calcext:value-type="float">
            <text:p>1298601.08474576</text:p>
          </table:table-cell>
          <table:table-cell table:style-name="ce224" table:formula="of:=SUM([.M120:.M124])" office:value-type="float" office:value="1443558.18644068" calcext:value-type="float">
            <text:p>1443558.18644068</text:p>
          </table:table-cell>
          <table:table-cell table:style-name="ce224" table:formula="of:=SUM([.N120:.N124])" office:value-type="float" office:value="1544610.36949153" calcext:value-type="float">
            <text:p>1544610.36949153</text:p>
          </table:table-cell>
          <table:table-cell table:style-name="ce224" table:formula="of:=SUM([.O120:.O124])" office:value-type="float" office:value="1652740.48535593" calcext:value-type="float">
            <text:p>1652740.48535593</text:p>
          </table:table-cell>
          <table:table-cell table:style-name="ce224" table:formula="of:=SUM([.P120:.P124])" office:value-type="float" office:value="1768439.78933085" calcext:value-type="float">
            <text:p>1768439.78933085</text:p>
          </table:table-cell>
          <table:table-cell table:style-name="ce224" table:formula="of:=SUM([.Q120:.Q124])" office:value-type="float" office:value="1892233.92458401" calcext:value-type="float">
            <text:p>1892233.92458401</text:p>
          </table:table-cell>
          <table:table-cell table:style-name="ce224" table:formula="of:=SUM([.R120:.R124])" office:value-type="float" office:value="2024685.32930489" calcext:value-type="float">
            <text:p>2024685.32930489</text:p>
          </table:table-cell>
          <table:table-cell table:style-name="ce224" table:formula="of:=SUM([.S120:.S124])" office:value-type="float" office:value="2166410.81235623" calcext:value-type="float">
            <text:p>2166410.81235623</text:p>
          </table:table-cell>
          <table:table-cell table:style-name="ce224" table:formula="of:=SUM([.T120:.T124])" office:value-type="float" office:value="2318054.30922117" calcext:value-type="float">
            <text:p>2318054.30922117</text:p>
          </table:table-cell>
          <table:table-cell table:style-name="ce224" table:formula="of:=SUM([.U120:.U124])" office:value-type="float" office:value="2480319.83086665" calcext:value-type="float">
            <text:p>2480319.83086665</text:p>
          </table:table-cell>
          <table:table-cell table:style-name="ce224" table:formula="of:=SUM([.V120:.V124])" office:value-type="float" office:value="18589599.1216977" calcext:value-type="float">
            <text:p>18589599.1216977</text:p>
          </table:table-cell>
          <table:table-cell table:number-columns-repeated="16362"/>
        </table:table-row>
        <table:table-row table:style-name="ro8" table:number-rows-repeated="104845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apital_Trabajo" table:style-name="ta8">
        <table:table-column table:style-name="co12" table:default-cell-style-name="ce236"/>
        <table:table-column table:style-name="co26" table:default-cell-style-name="ce236"/>
        <table:table-column table:style-name="co27" table:default-cell-style-name="ce236"/>
        <table:table-column table:style-name="co28" table:number-columns-repeated="12" table:default-cell-style-name="ce236"/>
        <table:table-column table:style-name="co12" table:number-columns-repeated="10" table:default-cell-style-name="ce236"/>
        <table:table-column table:style-name="co29" table:number-columns-repeated="16359" table:default-cell-style-name="ce236"/>
        <table:table-row table:style-name="ro9" table:number-rows-repeated="2">
          <table:table-cell table:number-columns-repeated="16384"/>
        </table:table-row>
        <table:table-row table:style-name="ro9">
          <table:table-cell/>
          <table:table-cell table:style-name="ce237" office:value-type="string" calcext:value-type="string" table:number-columns-spanned="14" table:number-rows-spanned="1">
            <text:p>CUADRO N° 05</text:p>
          </table:table-cell>
          <table:covered-table-cell table:number-columns-repeated="13" table:style-name="ce247"/>
          <table:table-cell table:number-columns-repeated="16369"/>
        </table:table-row>
        <table:table-row table:style-name="ro9">
          <table:table-cell/>
          <table:table-cell table:style-name="ce238" table:number-columns-repeated="14"/>
          <table:table-cell table:number-columns-repeated="16369"/>
        </table:table-row>
        <table:table-row table:style-name="ro9">
          <table:table-cell/>
          <table:table-cell table:style-name="ce237" table:number-columns-spanned="14" table:number-rows-spanned="1"/>
          <table:covered-table-cell table:number-columns-repeated="13" table:style-name="ce247"/>
          <table:table-cell table:number-columns-repeated="16369"/>
        </table:table-row>
        <table:table-row table:style-name="ro10">
          <table:table-cell/>
          <table:table-cell table:style-name="ce238" table:number-columns-repeated="14"/>
          <table:table-cell table:number-columns-repeated="16369"/>
        </table:table-row>
        <table:table-row table:style-name="ro9">
          <table:table-cell/>
          <table:table-cell table:style-name="ce239" office:value-type="string" calcext:value-type="string" table:number-columns-spanned="1" table:number-rows-spanned="2">
            <text:p>RUBRO</text:p>
          </table:table-cell>
          <table:table-cell table:style-name="ce239" office:value-type="float" office:value="0" calcext:value-type="float" table:number-columns-spanned="1" table:number-rows-spanned="2">
            <text:p>0</text:p>
          </table:table-cell>
          <table:table-cell table:style-name="ce253" office:value-type="string" calcext:value-type="string" table:number-columns-spanned="12" table:number-rows-spanned="1">
            <text:p>AÑO 1</text:p>
          </table:table-cell>
          <table:covered-table-cell table:number-columns-repeated="11" table:style-name="ce257"/>
          <table:table-cell table:style-name="ce259" office:value-type="string" calcext:value-type="string">
            <text:p>Total</text:p>
          </table:table-cell>
          <table:table-cell table:number-columns-repeated="16368"/>
        </table:table-row>
        <table:table-row table:style-name="ro9">
          <table:table-cell/>
          <table:covered-table-cell table:number-columns-repeated="2" table:style-name="ce240"/>
          <table:table-cell table:style-name="ce253" office:value-type="float" office:value="1" calcext:value-type="float">
            <text:p>1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3" calcext:value-type="float">
            <text:p>3</text:p>
          </table:table-cell>
          <table:table-cell table:style-name="ce253" office:value-type="float" office:value="4" calcext:value-type="float">
            <text:p>4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6" calcext:value-type="float">
            <text:p>6</text:p>
          </table:table-cell>
          <table:table-cell table:style-name="ce253" office:value-type="float" office:value="7" calcext:value-type="float">
            <text:p>7</text:p>
          </table:table-cell>
          <table:table-cell table:style-name="ce253" office:value-type="float" office:value="8" calcext:value-type="float">
            <text:p>8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10" calcext:value-type="float">
            <text:p>10</text:p>
          </table:table-cell>
          <table:table-cell table:style-name="ce253" office:value-type="float" office:value="11" calcext:value-type="float">
            <text:p>11</text:p>
          </table:table-cell>
          <table:table-cell table:style-name="ce253" office:value-type="float" office:value="12" calcext:value-type="float">
            <text:p>12</text:p>
          </table:table-cell>
          <table:table-cell table:style-name="ce260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DIESEL B5</text:p>
          </table:table-cell>
          <table:table-cell table:style-name="ce241"/>
          <table:table-cell table:style-name="ce254" table:formula="of:=+[$'Presupuesto de ventas'.C13]/2" office:value-type="float" office:value="2109.95475113122" calcext:value-type="float">
            <text:p>2,110</text:p>
          </table:table-cell>
          <table:table-cell table:style-name="ce254" table:formula="of:=+[$'Presupuesto de ventas'.D13]/2" office:value-type="float" office:value="2130.06535947712" calcext:value-type="float">
            <text:p>2,130</text:p>
          </table:table-cell>
          <table:table-cell table:style-name="ce254" table:formula="of:=+[$'Presupuesto de ventas'.E13]/2" office:value-type="float" office:value="2160.23127199598" calcext:value-type="float">
            <text:p>2,160</text:p>
          </table:table-cell>
          <table:table-cell table:style-name="ce254" table:formula="of:=+[$'Presupuesto de ventas'.F13]/2" office:value-type="float" office:value="2161.06083459025" calcext:value-type="float">
            <text:p>2,161</text:p>
          </table:table-cell>
          <table:table-cell table:style-name="ce254" table:formula="of:=+[$'Presupuesto de ventas'.G13]/2" office:value-type="float" office:value="2131.06083459025" calcext:value-type="float">
            <text:p>2,131</text:p>
          </table:table-cell>
          <table:table-cell table:style-name="ce254" table:formula="of:=+[$'Presupuesto de ventas'.H13]/2" office:value-type="float" office:value="2095.78431372549" calcext:value-type="float">
            <text:p>2,096</text:p>
          </table:table-cell>
          <table:table-cell table:style-name="ce254" table:formula="of:=+[$'Presupuesto de ventas'.I13]/2" office:value-type="float" office:value="3821.01558572147" calcext:value-type="float">
            <text:p>3,821</text:p>
          </table:table-cell>
          <table:table-cell table:style-name="ce254" table:formula="of:=+[$'Presupuesto de ventas'.J13]/2" office:value-type="float" office:value="2264.10256410257" calcext:value-type="float">
            <text:p>2,264</text:p>
          </table:table-cell>
          <table:table-cell table:style-name="ce254" table:formula="of:=+[$'Presupuesto de ventas'.K13]/2" office:value-type="float" office:value="2294.26847662142" calcext:value-type="float">
            <text:p>2,294</text:p>
          </table:table-cell>
          <table:table-cell table:style-name="ce254" table:formula="of:=+[$'Presupuesto de ventas'.L13]/2" office:value-type="float" office:value="2299.29612870789" calcext:value-type="float">
            <text:p>2,299</text:p>
          </table:table-cell>
          <table:table-cell table:style-name="ce254" table:formula="of:=+[$'Presupuesto de ventas'.M13]/2" office:value-type="float" office:value="2511.03821015586" calcext:value-type="float">
            <text:p>2,511</text:p>
          </table:table-cell>
          <table:table-cell table:style-name="ce254" table:formula="of:=+[$'Presupuesto de ventas'.N13]/2" office:value-type="float" office:value="4022.12166918049" calcext:value-type="float">
            <text:p>4,022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GASOGHOL 90</text:p>
          </table:table-cell>
          <table:table-cell table:style-name="ce241"/>
          <table:table-cell table:style-name="ce254" table:formula="of:=+[$'Presupuesto de ventas'.C28]/2" office:value-type="float" office:value="1582.46606334842" calcext:value-type="float">
            <text:p>1,582</text:p>
          </table:table-cell>
          <table:table-cell table:style-name="ce254" table:formula="of:=+[$'Presupuesto de ventas'.D28]/2" office:value-type="float" office:value="1597.54901960784" calcext:value-type="float">
            <text:p>1,598</text:p>
          </table:table-cell>
          <table:table-cell table:style-name="ce254" table:formula="of:=+[$'Presupuesto de ventas'.E28]/2" office:value-type="float" office:value="1620.17345399698" calcext:value-type="float">
            <text:p>1,620</text:p>
          </table:table-cell>
          <table:table-cell table:style-name="ce254" table:formula="of:=+[$'Presupuesto de ventas'.F28]/2" office:value-type="float" office:value="1620.79562594268" calcext:value-type="float">
            <text:p>1,621</text:p>
          </table:table-cell>
          <table:table-cell table:style-name="ce254" table:formula="of:=+[$'Presupuesto de ventas'.G28]/2" office:value-type="float" office:value="1598.29562594268" calcext:value-type="float">
            <text:p>1,598</text:p>
          </table:table-cell>
          <table:table-cell table:style-name="ce254" table:formula="of:=+[$'Presupuesto de ventas'.H28]/2" office:value-type="float" office:value="1571.83823529412" calcext:value-type="float">
            <text:p>1,572</text:p>
          </table:table-cell>
          <table:table-cell table:style-name="ce254" table:formula="of:=+[$'Presupuesto de ventas'.I28]/2" office:value-type="float" office:value="2865.7616892911" calcext:value-type="float">
            <text:p>2,866</text:p>
          </table:table-cell>
          <table:table-cell table:style-name="ce254" table:formula="of:=+[$'Presupuesto de ventas'.J28]/2" office:value-type="float" office:value="1698.07692307692" calcext:value-type="float">
            <text:p>1,698</text:p>
          </table:table-cell>
          <table:table-cell table:style-name="ce254" table:formula="of:=+[$'Presupuesto de ventas'.K28]/2" office:value-type="float" office:value="1720.70135746606" calcext:value-type="float">
            <text:p>1,721</text:p>
          </table:table-cell>
          <table:table-cell table:style-name="ce254" table:formula="of:=+[$'Presupuesto de ventas'.L28]/2" office:value-type="float" office:value="1724.47209653092" calcext:value-type="float">
            <text:p>1,724</text:p>
          </table:table-cell>
          <table:table-cell table:style-name="ce254" table:formula="of:=+[$'Presupuesto de ventas'.M28]/2" office:value-type="float" office:value="1883.27865761689" calcext:value-type="float">
            <text:p>1,883</text:p>
          </table:table-cell>
          <table:table-cell table:style-name="ce254" table:formula="of:=+[$'Presupuesto de ventas'.N28]/2" office:value-type="float" office:value="3016.59125188537" calcext:value-type="float">
            <text:p>3,017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GASOHOL 95</text:p>
          </table:table-cell>
          <table:table-cell table:style-name="ce241"/>
          <table:table-cell table:style-name="ce254" table:formula="of:=+[$'Presupuesto de ventas'.C43]/2" office:value-type="float" office:value="386.825037707391" calcext:value-type="float">
            <text:p>387</text:p>
          </table:table-cell>
          <table:table-cell table:style-name="ce254" table:formula="of:=+[$'Presupuesto de ventas'.D43]/2" office:value-type="float" office:value="390.511982570806" calcext:value-type="float">
            <text:p>391</text:p>
          </table:table-cell>
          <table:table-cell table:style-name="ce254" table:formula="of:=+[$'Presupuesto de ventas'.E43]/2" office:value-type="float" office:value="396.042399865929" calcext:value-type="float">
            <text:p>396</text:p>
          </table:table-cell>
          <table:table-cell table:style-name="ce254" table:formula="of:=+[$'Presupuesto de ventas'.F43]/2" office:value-type="float" office:value="396.194486341545" calcext:value-type="float">
            <text:p>396</text:p>
          </table:table-cell>
          <table:table-cell table:style-name="ce254" table:formula="of:=+[$'Presupuesto de ventas'.G43]/2" office:value-type="float" office:value="390.694486341545" calcext:value-type="float">
            <text:p>391</text:p>
          </table:table-cell>
          <table:table-cell table:style-name="ce254" table:formula="of:=+[$'Presupuesto de ventas'.H43]/2" office:value-type="float" office:value="384.227124183007" calcext:value-type="float">
            <text:p>384</text:p>
          </table:table-cell>
          <table:table-cell table:style-name="ce254" table:formula="of:=+[$'Presupuesto de ventas'.I43]/2" office:value-type="float" office:value="700.519524048936" calcext:value-type="float">
            <text:p>701</text:p>
          </table:table-cell>
          <table:table-cell table:style-name="ce254" table:formula="of:=+[$'Presupuesto de ventas'.J43]/2" office:value-type="float" office:value="415.08547008547" calcext:value-type="float">
            <text:p>415</text:p>
          </table:table-cell>
          <table:table-cell table:style-name="ce254" table:formula="of:=+[$'Presupuesto de ventas'.K43]/2" office:value-type="float" office:value="420.615887380593" calcext:value-type="float">
            <text:p>421</text:p>
          </table:table-cell>
          <table:table-cell table:style-name="ce254" table:formula="of:=+[$'Presupuesto de ventas'.L43]/2" office:value-type="float" office:value="421.537623596447" calcext:value-type="float">
            <text:p>422</text:p>
          </table:table-cell>
          <table:table-cell table:style-name="ce254" table:formula="of:=+[$'Presupuesto de ventas'.M43]/2" office:value-type="float" office:value="460.35700519524" calcext:value-type="float">
            <text:p>460</text:p>
          </table:table-cell>
          <table:table-cell table:style-name="ce254" table:formula="of:=+[$'Presupuesto de ventas'.N43]/2" office:value-type="float" office:value="737.38897268309" calcext:value-type="float">
            <text:p>737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valor de compra DB5</text:p>
          </table:table-cell>
          <table:table-cell table:style-name="ce241"/>
          <table:table-cell table:style-name="ce255" table:formula="of:=+[$Resumen.$C$10]" office:value-type="float" office:value="8.05889830508475" calcext:value-type="float">
            <text:p>8.06</text:p>
          </table:table-cell>
          <table:table-cell table:style-name="ce255" table:formula="of:=+[$Resumen.$C$10]" office:value-type="float" office:value="8.05889830508475" calcext:value-type="float">
            <text:p>8.06</text:p>
          </table:table-cell>
          <table:table-cell table:style-name="ce255" table:formula="of:=+[$Resumen.$C$10]" office:value-type="float" office:value="8.05889830508475" calcext:value-type="float">
            <text:p>8.06</text:p>
          </table:table-cell>
          <table:table-cell table:style-name="ce255" table:formula="of:=+[$Resumen.$C$10]" office:value-type="float" office:value="8.05889830508475" calcext:value-type="float">
            <text:p>8.06</text:p>
          </table:table-cell>
          <table:table-cell table:style-name="ce255" table:formula="of:=+[$Resumen.$C$10]" office:value-type="float" office:value="8.05889830508475" calcext:value-type="float">
            <text:p>8.06</text:p>
          </table:table-cell>
          <table:table-cell table:style-name="ce255" table:formula="of:=+[$Resumen.$C$10]" office:value-type="float" office:value="8.05889830508475" calcext:value-type="float">
            <text:p>8.06</text:p>
          </table:table-cell>
          <table:table-cell table:style-name="ce255" table:formula="of:=+[$Resumen.$C$10]" office:value-type="float" office:value="8.05889830508475" calcext:value-type="float">
            <text:p>8.06</text:p>
          </table:table-cell>
          <table:table-cell table:style-name="ce255" table:formula="of:=+[$Resumen.$C$10]" office:value-type="float" office:value="8.05889830508475" calcext:value-type="float">
            <text:p>8.06</text:p>
          </table:table-cell>
          <table:table-cell table:style-name="ce255" table:formula="of:=+[$Resumen.$C$10]" office:value-type="float" office:value="8.05889830508475" calcext:value-type="float">
            <text:p>8.06</text:p>
          </table:table-cell>
          <table:table-cell table:style-name="ce255" table:formula="of:=+[$Resumen.$C$10]" office:value-type="float" office:value="8.05889830508475" calcext:value-type="float">
            <text:p>8.06</text:p>
          </table:table-cell>
          <table:table-cell table:style-name="ce255" table:formula="of:=+[$Resumen.$C$10]" office:value-type="float" office:value="8.05889830508475" calcext:value-type="float">
            <text:p>8.06</text:p>
          </table:table-cell>
          <table:table-cell table:style-name="ce255" table:formula="of:=+[$Resumen.$C$10]" office:value-type="float" office:value="8.05889830508475" calcext:value-type="float">
            <text:p>8.06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valor de compra G90</text:p>
          </table:table-cell>
          <table:table-cell table:style-name="ce241"/>
          <table:table-cell table:style-name="ce255" table:formula="of:=+[$Resumen.$C$11]" office:value-type="float" office:value="8.19576271186441" calcext:value-type="float">
            <text:p>8.20</text:p>
          </table:table-cell>
          <table:table-cell table:style-name="ce255" table:formula="of:=+[$Resumen.$C$11]" office:value-type="float" office:value="8.19576271186441" calcext:value-type="float">
            <text:p>8.20</text:p>
          </table:table-cell>
          <table:table-cell table:style-name="ce255" table:formula="of:=+[$Resumen.$C$11]" office:value-type="float" office:value="8.19576271186441" calcext:value-type="float">
            <text:p>8.20</text:p>
          </table:table-cell>
          <table:table-cell table:style-name="ce255" table:formula="of:=+[$Resumen.$C$11]" office:value-type="float" office:value="8.19576271186441" calcext:value-type="float">
            <text:p>8.20</text:p>
          </table:table-cell>
          <table:table-cell table:style-name="ce255" table:formula="of:=+[$Resumen.$C$11]" office:value-type="float" office:value="8.19576271186441" calcext:value-type="float">
            <text:p>8.20</text:p>
          </table:table-cell>
          <table:table-cell table:style-name="ce255" table:formula="of:=+[$Resumen.$C$11]" office:value-type="float" office:value="8.19576271186441" calcext:value-type="float">
            <text:p>8.20</text:p>
          </table:table-cell>
          <table:table-cell table:style-name="ce255" table:formula="of:=+[$Resumen.$C$11]" office:value-type="float" office:value="8.19576271186441" calcext:value-type="float">
            <text:p>8.20</text:p>
          </table:table-cell>
          <table:table-cell table:style-name="ce255" table:formula="of:=+[$Resumen.$C$11]" office:value-type="float" office:value="8.19576271186441" calcext:value-type="float">
            <text:p>8.20</text:p>
          </table:table-cell>
          <table:table-cell table:style-name="ce255" table:formula="of:=+[$Resumen.$C$11]" office:value-type="float" office:value="8.19576271186441" calcext:value-type="float">
            <text:p>8.20</text:p>
          </table:table-cell>
          <table:table-cell table:style-name="ce255" table:formula="of:=+[$Resumen.$C$11]" office:value-type="float" office:value="8.19576271186441" calcext:value-type="float">
            <text:p>8.20</text:p>
          </table:table-cell>
          <table:table-cell table:style-name="ce255" table:formula="of:=+[$Resumen.$C$11]" office:value-type="float" office:value="8.19576271186441" calcext:value-type="float">
            <text:p>8.20</text:p>
          </table:table-cell>
          <table:table-cell table:style-name="ce255" table:formula="of:=+[$Resumen.$C$11]" office:value-type="float" office:value="8.19576271186441" calcext:value-type="float">
            <text:p>8.20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valor de compra G95</text:p>
          </table:table-cell>
          <table:table-cell table:style-name="ce241"/>
          <table:table-cell table:style-name="ce255" table:formula="of:=+[$Resumen.$C$12]" office:value-type="float" office:value="8.45338983050847" calcext:value-type="float">
            <text:p>8.45</text:p>
          </table:table-cell>
          <table:table-cell table:style-name="ce255" table:formula="of:=+[$Resumen.$C$12]" office:value-type="float" office:value="8.45338983050847" calcext:value-type="float">
            <text:p>8.45</text:p>
          </table:table-cell>
          <table:table-cell table:style-name="ce255" table:formula="of:=+[$Resumen.$C$12]" office:value-type="float" office:value="8.45338983050847" calcext:value-type="float">
            <text:p>8.45</text:p>
          </table:table-cell>
          <table:table-cell table:style-name="ce255" table:formula="of:=+[$Resumen.$C$12]" office:value-type="float" office:value="8.45338983050847" calcext:value-type="float">
            <text:p>8.45</text:p>
          </table:table-cell>
          <table:table-cell table:style-name="ce255" table:formula="of:=+[$Resumen.$C$12]" office:value-type="float" office:value="8.45338983050847" calcext:value-type="float">
            <text:p>8.45</text:p>
          </table:table-cell>
          <table:table-cell table:style-name="ce255" table:formula="of:=+[$Resumen.$C$12]" office:value-type="float" office:value="8.45338983050847" calcext:value-type="float">
            <text:p>8.45</text:p>
          </table:table-cell>
          <table:table-cell table:style-name="ce255" table:formula="of:=+[$Resumen.$C$12]" office:value-type="float" office:value="8.45338983050847" calcext:value-type="float">
            <text:p>8.45</text:p>
          </table:table-cell>
          <table:table-cell table:style-name="ce255" table:formula="of:=+[$Resumen.$C$12]" office:value-type="float" office:value="8.45338983050847" calcext:value-type="float">
            <text:p>8.45</text:p>
          </table:table-cell>
          <table:table-cell table:style-name="ce255" table:formula="of:=+[$Resumen.$C$12]" office:value-type="float" office:value="8.45338983050847" calcext:value-type="float">
            <text:p>8.45</text:p>
          </table:table-cell>
          <table:table-cell table:style-name="ce255" table:formula="of:=+[$Resumen.$C$12]" office:value-type="float" office:value="8.45338983050847" calcext:value-type="float">
            <text:p>8.45</text:p>
          </table:table-cell>
          <table:table-cell table:style-name="ce255" table:formula="of:=+[$Resumen.$C$12]" office:value-type="float" office:value="8.45338983050847" calcext:value-type="float">
            <text:p>8.45</text:p>
          </table:table-cell>
          <table:table-cell table:style-name="ce255" table:formula="of:=+[$Resumen.$C$12]" office:value-type="float" office:value="8.45338983050847" calcext:value-type="float">
            <text:p>8.45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Capital de Trabajo</text:p>
          </table:table-cell>
          <table:table-cell table:style-name="ce248"/>
          <table:table-cell table:style-name="ce248" table:formula="of:=+[.D9]*[.D12]+[.D10]*[.D13]+[.D11]*[.D14]" office:value-type="float" office:value="33243.4099624204" calcext:value-type="float">
            <text:p>33243</text:p>
          </table:table-cell>
          <table:table-cell table:style-name="ce248" table:formula="of:=+[.E9]*[.E12]+[.E10]*[.E13]+[.E11]*[.E14]" office:value-type="float" office:value="33560.2628226432" calcext:value-type="float">
            <text:p>33560</text:p>
          </table:table-cell>
          <table:table-cell table:style-name="ce248" table:formula="of:=+[.F9]*[.F12]+[.F10]*[.F13]+[.F11]*[.F14]" office:value-type="float" office:value="34035.5421129773" calcext:value-type="float">
            <text:p>34036</text:p>
          </table:table-cell>
          <table:table-cell table:style-name="ce248" table:formula="of:=+[.G9]*[.G12]+[.G10]*[.G13]+[.G11]*[.G14]" office:value-type="float" office:value="34048.6122934615" calcext:value-type="float">
            <text:p>34049</text:p>
          </table:table-cell>
          <table:table-cell table:style-name="ce248" table:formula="of:=+[.H9]*[.H12]+[.H10]*[.H13]+[.H11]*[.H14]" office:value-type="float" office:value="33575.9470392242" calcext:value-type="float">
            <text:p>33576</text:p>
          </table:table-cell>
          <table:table-cell table:style-name="ce248" table:formula="of:=+[.I9]*[.I12]+[.I10]*[.I13]+[.I11]*[.I14]" office:value-type="float" office:value="33020.147515786" calcext:value-type="float">
            <text:p>33020</text:p>
          </table:table-cell>
          <table:table-cell table:style-name="ce248" table:formula="of:=+[.J9]*[.J12]+[.J10]*[.J13]+[.J11]*[.J14]" office:value-type="float" office:value="60202.0434423226" calcext:value-type="float">
            <text:p>60202</text:p>
          </table:table-cell>
          <table:table-cell table:style-name="ce248" table:formula="of:=+[.K9]*[.K12]+[.K10]*[.K13]+[.K11]*[.K14]" office:value-type="float" office:value="35672.0871360278" calcext:value-type="float">
            <text:p>35672</text:p>
          </table:table-cell>
          <table:table-cell table:style-name="ce248" table:formula="of:=+[.L9]*[.L12]+[.L10]*[.L13]+[.L11]*[.L14]" office:value-type="float" office:value="36147.366426362" calcext:value-type="float">
            <text:p>36147</text:p>
          </table:table-cell>
          <table:table-cell table:style-name="ce248" table:formula="of:=+[.M9]*[.M12]+[.M10]*[.M13]+[.M11]*[.M14]" office:value-type="float" office:value="36226.5796414176" calcext:value-type="float">
            <text:p>36227</text:p>
          </table:table-cell>
          <table:table-cell table:style-name="ce248" table:formula="of:=+[.N9]*[.N12]+[.N10]*[.N13]+[.N11]*[.N14]" office:value-type="float" office:value="39562.6838000954" calcext:value-type="float">
            <text:p>39563</text:p>
          </table:table-cell>
          <table:table-cell table:style-name="ce248" table:formula="of:=+[.O9]*[.O12]+[.O10]*[.O13]+[.O11]*[.O14]" office:value-type="float" office:value="63370.5720445501" calcext:value-type="float">
            <text:p>63371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Variacion KW</text:p>
          </table:table-cell>
          <table:table-cell table:style-name="ce248" table:formula="of:=+[.D15]" office:value-type="float" office:value="33243.4099624204" calcext:value-type="float">
            <text:p>33243</text:p>
          </table:table-cell>
          <table:table-cell table:style-name="ce248" table:formula="of:=+[.E15]-[.D15]" office:value-type="float" office:value="316.85286022276" calcext:value-type="float">
            <text:p>317</text:p>
          </table:table-cell>
          <table:table-cell table:style-name="ce248" table:formula="of:=+[.F15]-[.E15]" office:value-type="float" office:value="475.279290334118" calcext:value-type="float">
            <text:p>475</text:p>
          </table:table-cell>
          <table:table-cell table:style-name="ce248" table:formula="of:=+[.G15]-[.F15]" office:value-type="float" office:value="13.070180484181" calcext:value-type="float">
            <text:p>13</text:p>
          </table:table-cell>
          <table:table-cell table:style-name="ce248" table:formula="of:=+[.H15]-[.G15]" office:value-type="float" office:value="-472.66525423729" calcext:value-type="float">
            <text:p>-473</text:p>
          </table:table-cell>
          <table:table-cell table:style-name="ce248" table:formula="of:=+[.I15]-[.H15]" office:value-type="float" office:value="-555.799523438232" calcext:value-type="float">
            <text:p>-556</text:p>
          </table:table-cell>
          <table:table-cell table:style-name="ce248" table:formula="of:=+[.J15]-[.I15]" office:value-type="float" office:value="27181.8959265366" calcext:value-type="float">
            <text:p>27182</text:p>
          </table:table-cell>
          <table:table-cell table:style-name="ce248" table:formula="of:=+[.K15]-[.J15]" office:value-type="float" office:value="-24529.9563062948" calcext:value-type="float">
            <text:p>-24530</text:p>
          </table:table-cell>
          <table:table-cell table:style-name="ce248" table:formula="of:=+[.L15]-[.K15]" office:value-type="float" office:value="475.279290334118" calcext:value-type="float">
            <text:p>475</text:p>
          </table:table-cell>
          <table:table-cell table:style-name="ce248" table:formula="of:=+[.M15]-[.L15]" office:value-type="float" office:value="79.2132150556718" calcext:value-type="float">
            <text:p>79</text:p>
          </table:table-cell>
          <table:table-cell table:style-name="ce248" table:formula="of:=+[.N15]-[.M15]" office:value-type="float" office:value="3336.10415867779" calcext:value-type="float">
            <text:p>3336</text:p>
          </table:table-cell>
          <table:table-cell table:style-name="ce248" table:formula="of:=+[.O15]-[.N15]" office:value-type="float" office:value="23807.8882444547" calcext:value-type="float">
            <text:p>23808</text:p>
          </table:table-cell>
          <table:table-cell table:style-name="ce248"/>
          <table:table-cell table:style-name="ce261" table:formula="of:=SUM([.C16:.O16])" office:value-type="float" office:value="63370.5720445501" calcext:value-type="float">
            <text:p>63371</text:p>
          </table:table-cell>
          <table:table-cell office:value-type="float" office:value="1" calcext:value-type="float">
            <text:p>1</text:p>
          </table:table-cell>
          <table:table-cell table:number-columns-repeated="16367"/>
        </table:table-row>
        <table:table-row table:style-name="ro10">
          <table:table-cell/>
          <table:table-cell table:style-name="ce242" office:value-type="string" calcext:value-type="string">
            <text:p>TOTAL</text:p>
          </table:table-cell>
          <table:table-cell table:style-name="ce241"/>
          <table:table-cell table:style-name="ce248" table:formula="of:=SUM([.D15:.D16])" office:value-type="float" office:value="33560.2628226432" calcext:value-type="float">
            <text:p>33560</text:p>
          </table:table-cell>
          <table:table-cell table:style-name="ce248" table:formula="of:=SUM([.E15:.E16])" office:value-type="float" office:value="34035.5421129773" calcext:value-type="float">
            <text:p>34036</text:p>
          </table:table-cell>
          <table:table-cell table:style-name="ce248" table:formula="of:=SUM([.F15:.F16])" office:value-type="float" office:value="34048.6122934615" calcext:value-type="float">
            <text:p>34049</text:p>
          </table:table-cell>
          <table:table-cell table:style-name="ce248" table:formula="of:=SUM([.G15:.G16])" office:value-type="float" office:value="33575.9470392242" calcext:value-type="float">
            <text:p>33576</text:p>
          </table:table-cell>
          <table:table-cell table:style-name="ce248" table:formula="of:=SUM([.H15:.H16])" office:value-type="float" office:value="33020.147515786" calcext:value-type="float">
            <text:p>33020</text:p>
          </table:table-cell>
          <table:table-cell table:style-name="ce248" table:formula="of:=SUM([.I15:.I16])" office:value-type="float" office:value="60202.0434423226" calcext:value-type="float">
            <text:p>60202</text:p>
          </table:table-cell>
          <table:table-cell table:style-name="ce248" table:formula="of:=SUM([.J15:.J16])" office:value-type="float" office:value="35672.0871360278" calcext:value-type="float">
            <text:p>35672</text:p>
          </table:table-cell>
          <table:table-cell table:style-name="ce248" table:formula="of:=SUM([.K15:.K16])" office:value-type="float" office:value="36147.366426362" calcext:value-type="float">
            <text:p>36147</text:p>
          </table:table-cell>
          <table:table-cell table:style-name="ce248" table:formula="of:=SUM([.L15:.L16])" office:value-type="float" office:value="36226.5796414176" calcext:value-type="float">
            <text:p>36227</text:p>
          </table:table-cell>
          <table:table-cell table:style-name="ce248" table:formula="of:=SUM([.M15:.M16])" office:value-type="float" office:value="39562.6838000954" calcext:value-type="float">
            <text:p>39563</text:p>
          </table:table-cell>
          <table:table-cell table:style-name="ce248" table:formula="of:=SUM([.N15:.N16])" office:value-type="float" office:value="63370.5720445501" calcext:value-type="float">
            <text:p>63371</text:p>
          </table:table-cell>
          <table:table-cell table:style-name="ce248" table:formula="of:=SUM([.O15:.O16])" office:value-type="float" office:value="63370.5720445501" calcext:value-type="float">
            <text:p>63371</text:p>
          </table:table-cell>
          <table:table-cell table:style-name="ce246"/>
          <table:table-cell table:number-columns-repeated="16368"/>
        </table:table-row>
        <table:table-row table:style-name="ro9">
          <table:table-cell table:number-columns-repeated="16384"/>
        </table:table-row>
        <table:table-row table:style-name="ro9">
          <table:table-cell/>
          <table:table-cell table:style-name="ce239" office:value-type="string" calcext:value-type="string" table:number-columns-spanned="1" table:number-rows-spanned="2">
            <text:p>RUBRO</text:p>
          </table:table-cell>
          <table:table-cell table:style-name="ce239" office:value-type="float" office:value="1" calcext:value-type="float" table:number-columns-spanned="1" table:number-rows-spanned="2">
            <text:p>1</text:p>
          </table:table-cell>
          <table:table-cell table:style-name="ce239" office:value-type="string" calcext:value-type="string" table:number-columns-spanned="12" table:number-rows-spanned="1">
            <text:p>AÑO 2</text:p>
          </table:table-cell>
          <table:covered-table-cell table:number-columns-repeated="11" table:style-name="ce240"/>
          <table:table-cell table:style-name="ce259" office:value-type="string" calcext:value-type="string">
            <text:p>Total</text:p>
          </table:table-cell>
          <table:table-cell table:number-columns-repeated="16368"/>
        </table:table-row>
        <table:table-row table:style-name="ro9">
          <table:table-cell/>
          <table:covered-table-cell table:number-columns-repeated="2" table:style-name="ce240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62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DIESEL B5</text:p>
          </table:table-cell>
          <table:table-cell table:style-name="ce241"/>
          <table:table-cell table:style-name="ce254" table:formula="of:=+[$'Presupuesto de ventas'.C14]/2" office:value-type="float" office:value="2285.78431372549" calcext:value-type="float">
            <text:p>2,286</text:p>
          </table:table-cell>
          <table:table-cell table:style-name="ce254" table:formula="of:=+[$'Presupuesto de ventas'.D14]/2" office:value-type="float" office:value="2307.57080610022" calcext:value-type="float">
            <text:p>2,308</text:p>
          </table:table-cell>
          <table:table-cell table:style-name="ce254" table:formula="of:=+[$'Presupuesto de ventas'.E14]/2" office:value-type="float" office:value="2340.25054466231" calcext:value-type="float">
            <text:p>2,340</text:p>
          </table:table-cell>
          <table:table-cell table:style-name="ce254" table:formula="of:=+[$'Presupuesto de ventas'.F14]/2" office:value-type="float" office:value="2341.14923747277" calcext:value-type="float">
            <text:p>2,341</text:p>
          </table:table-cell>
          <table:table-cell table:style-name="ce254" table:formula="of:=+[$'Presupuesto de ventas'.G14]/2" office:value-type="float" office:value="2308.64923747277" calcext:value-type="float">
            <text:p>2,309</text:p>
          </table:table-cell>
          <table:table-cell table:style-name="ce254" table:formula="of:=+[$'Presupuesto de ventas'.H14]/2" office:value-type="float" office:value="2270.43300653595" calcext:value-type="float">
            <text:p>2,270</text:p>
          </table:table-cell>
          <table:table-cell table:style-name="ce254" table:formula="of:=+[$'Presupuesto de ventas'.I14]/2" office:value-type="float" office:value="4139.43355119826" calcext:value-type="float">
            <text:p>4,139</text:p>
          </table:table-cell>
          <table:table-cell table:style-name="ce254" table:formula="of:=+[$'Presupuesto de ventas'.J14]/2" office:value-type="float" office:value="2452.77777777778" calcext:value-type="float">
            <text:p>2,453</text:p>
          </table:table-cell>
          <table:table-cell table:style-name="ce254" table:formula="of:=+[$'Presupuesto de ventas'.K14]/2" office:value-type="float" office:value="2485.45751633987" calcext:value-type="float">
            <text:p>2,485</text:p>
          </table:table-cell>
          <table:table-cell table:style-name="ce254" table:formula="of:=+[$'Presupuesto de ventas'.L14]/2" office:value-type="float" office:value="2490.90413943355" calcext:value-type="float">
            <text:p>2,491</text:p>
          </table:table-cell>
          <table:table-cell table:style-name="ce254" table:formula="of:=+[$'Presupuesto de ventas'.M14]/2" office:value-type="float" office:value="2720.29139433551" calcext:value-type="float">
            <text:p>2,720</text:p>
          </table:table-cell>
          <table:table-cell table:style-name="ce254" table:formula="of:=+[$'Presupuesto de ventas'.N14]/2" office:value-type="float" office:value="4357.29847494553" calcext:value-type="float">
            <text:p>4,357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GASOGHOL 90</text:p>
          </table:table-cell>
          <table:table-cell table:style-name="ce241"/>
          <table:table-cell table:style-name="ce254" table:formula="of:=+[$'Presupuesto de ventas'.C29]/2" office:value-type="float" office:value="1828.62745098039" calcext:value-type="float">
            <text:p>1,829</text:p>
          </table:table-cell>
          <table:table-cell table:style-name="ce254" table:formula="of:=+[$'Presupuesto de ventas'.D29]/2" office:value-type="float" office:value="1846.05664488017" calcext:value-type="float">
            <text:p>1,846</text:p>
          </table:table-cell>
          <table:table-cell table:style-name="ce254" table:formula="of:=+[$'Presupuesto de ventas'.E29]/2" office:value-type="float" office:value="1872.20043572985" calcext:value-type="float">
            <text:p>1,872</text:p>
          </table:table-cell>
          <table:table-cell table:style-name="ce254" table:formula="of:=+[$'Presupuesto de ventas'.F29]/2" office:value-type="float" office:value="1872.91938997821" calcext:value-type="float">
            <text:p>1,873</text:p>
          </table:table-cell>
          <table:table-cell table:style-name="ce254" table:formula="of:=+[$'Presupuesto de ventas'.G29]/2" office:value-type="float" office:value="1846.91938997821" calcext:value-type="float">
            <text:p>1,847</text:p>
          </table:table-cell>
          <table:table-cell table:style-name="ce254" table:formula="of:=+[$'Presupuesto de ventas'.H29]/2" office:value-type="float" office:value="1816.34640522876" calcext:value-type="float">
            <text:p>1,816</text:p>
          </table:table-cell>
          <table:table-cell table:style-name="ce254" table:formula="of:=+[$'Presupuesto de ventas'.I29]/2" office:value-type="float" office:value="3311.54684095861" calcext:value-type="float">
            <text:p>3,312</text:p>
          </table:table-cell>
          <table:table-cell table:style-name="ce254" table:formula="of:=+[$'Presupuesto de ventas'.J29]/2" office:value-type="float" office:value="1962.22222222222" calcext:value-type="float">
            <text:p>1,962</text:p>
          </table:table-cell>
          <table:table-cell table:style-name="ce254" table:formula="of:=+[$'Presupuesto de ventas'.K29]/2" office:value-type="float" office:value="1988.3660130719" calcext:value-type="float">
            <text:p>1,988</text:p>
          </table:table-cell>
          <table:table-cell table:style-name="ce254" table:formula="of:=+[$'Presupuesto de ventas'.L29]/2" office:value-type="float" office:value="1992.72331154684" calcext:value-type="float">
            <text:p>1,993</text:p>
          </table:table-cell>
          <table:table-cell table:style-name="ce254" table:formula="of:=+[$'Presupuesto de ventas'.M29]/2" office:value-type="float" office:value="2176.23311546841" calcext:value-type="float">
            <text:p>2,176</text:p>
          </table:table-cell>
          <table:table-cell table:style-name="ce254" table:formula="of:=+[$'Presupuesto de ventas'.N29]/2" office:value-type="float" office:value="3485.83877995643" calcext:value-type="float">
            <text:p>3,486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GASOHOL 95</text:p>
          </table:table-cell>
          <table:table-cell table:style-name="ce241"/>
          <table:table-cell table:style-name="ce254" table:formula="of:=+[$'Presupuesto de ventas'.C44]/2" office:value-type="float" office:value="421.990950226244" calcext:value-type="float">
            <text:p>422</text:p>
          </table:table-cell>
          <table:table-cell table:style-name="ce254" table:formula="of:=+[$'Presupuesto de ventas'.D44]/2" office:value-type="float" office:value="426.013071895425" calcext:value-type="float">
            <text:p>426</text:p>
          </table:table-cell>
          <table:table-cell table:style-name="ce254" table:formula="of:=+[$'Presupuesto de ventas'.E44]/2" office:value-type="float" office:value="432.046254399196" calcext:value-type="float">
            <text:p>432</text:p>
          </table:table-cell>
          <table:table-cell table:style-name="ce254" table:formula="of:=+[$'Presupuesto de ventas'.F44]/2" office:value-type="float" office:value="432.212166918049" calcext:value-type="float">
            <text:p>432</text:p>
          </table:table-cell>
          <table:table-cell table:style-name="ce254" table:formula="of:=+[$'Presupuesto de ventas'.G44]/2" office:value-type="float" office:value="426.212166918049" calcext:value-type="float">
            <text:p>426</text:p>
          </table:table-cell>
          <table:table-cell table:style-name="ce254" table:formula="of:=+[$'Presupuesto de ventas'.H44]/2" office:value-type="float" office:value="419.156862745098" calcext:value-type="float">
            <text:p>419</text:p>
          </table:table-cell>
          <table:table-cell table:style-name="ce254" table:formula="of:=+[$'Presupuesto de ventas'.I44]/2" office:value-type="float" office:value="764.203117144294" calcext:value-type="float">
            <text:p>764</text:p>
          </table:table-cell>
          <table:table-cell table:style-name="ce254" table:formula="of:=+[$'Presupuesto de ventas'.J44]/2" office:value-type="float" office:value="452.820512820513" calcext:value-type="float">
            <text:p>453</text:p>
          </table:table-cell>
          <table:table-cell table:style-name="ce254" table:formula="of:=+[$'Presupuesto de ventas'.K44]/2" office:value-type="float" office:value="458.853695324284" calcext:value-type="float">
            <text:p>459</text:p>
          </table:table-cell>
          <table:table-cell table:style-name="ce254" table:formula="of:=+[$'Presupuesto de ventas'.L44]/2" office:value-type="float" office:value="459.859225741579" calcext:value-type="float">
            <text:p>460</text:p>
          </table:table-cell>
          <table:table-cell table:style-name="ce254" table:formula="of:=+[$'Presupuesto de ventas'.M44]/2" office:value-type="float" office:value="502.207642031171" calcext:value-type="float">
            <text:p>502</text:p>
          </table:table-cell>
          <table:table-cell table:style-name="ce254" table:formula="of:=+[$'Presupuesto de ventas'.N44]/2" office:value-type="float" office:value="804.424333836098" calcext:value-type="float">
            <text:p>804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valor de compra DB5</text:p>
          </table:table-cell>
          <table:table-cell table:style-name="ce241"/>
          <table:table-cell table:style-name="ce255" table:formula="of:=+[.D12]" office:value-type="float" office:value="8.05889830508475" calcext:value-type="float">
            <text:p>8.06</text:p>
          </table:table-cell>
          <table:table-cell table:style-name="ce255" table:formula="of:=+[.E12]" office:value-type="float" office:value="8.05889830508475" calcext:value-type="float">
            <text:p>8.06</text:p>
          </table:table-cell>
          <table:table-cell table:style-name="ce255" table:formula="of:=+[.F12]" office:value-type="float" office:value="8.05889830508475" calcext:value-type="float">
            <text:p>8.06</text:p>
          </table:table-cell>
          <table:table-cell table:style-name="ce255" table:formula="of:=+[.G12]" office:value-type="float" office:value="8.05889830508475" calcext:value-type="float">
            <text:p>8.06</text:p>
          </table:table-cell>
          <table:table-cell table:style-name="ce255" table:formula="of:=+[.H12]" office:value-type="float" office:value="8.05889830508475" calcext:value-type="float">
            <text:p>8.06</text:p>
          </table:table-cell>
          <table:table-cell table:style-name="ce255" table:formula="of:=+[.I12]" office:value-type="float" office:value="8.05889830508475" calcext:value-type="float">
            <text:p>8.06</text:p>
          </table:table-cell>
          <table:table-cell table:style-name="ce255" table:formula="of:=+[.J12]" office:value-type="float" office:value="8.05889830508475" calcext:value-type="float">
            <text:p>8.06</text:p>
          </table:table-cell>
          <table:table-cell table:style-name="ce255" table:formula="of:=+[.K12]" office:value-type="float" office:value="8.05889830508475" calcext:value-type="float">
            <text:p>8.06</text:p>
          </table:table-cell>
          <table:table-cell table:style-name="ce255" table:formula="of:=+[.L12]" office:value-type="float" office:value="8.05889830508475" calcext:value-type="float">
            <text:p>8.06</text:p>
          </table:table-cell>
          <table:table-cell table:style-name="ce255" table:formula="of:=+[.M12]" office:value-type="float" office:value="8.05889830508475" calcext:value-type="float">
            <text:p>8.06</text:p>
          </table:table-cell>
          <table:table-cell table:style-name="ce255" table:formula="of:=+[.N12]" office:value-type="float" office:value="8.05889830508475" calcext:value-type="float">
            <text:p>8.06</text:p>
          </table:table-cell>
          <table:table-cell table:style-name="ce255" table:formula="of:=+[.O12]" office:value-type="float" office:value="8.05889830508475" calcext:value-type="float">
            <text:p>8.06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valor de compra G90</text:p>
          </table:table-cell>
          <table:table-cell table:style-name="ce241"/>
          <table:table-cell table:style-name="ce255" table:formula="of:=+[.D13]" office:value-type="float" office:value="8.19576271186441" calcext:value-type="float">
            <text:p>8.20</text:p>
          </table:table-cell>
          <table:table-cell table:style-name="ce255" table:formula="of:=+[.E13]" office:value-type="float" office:value="8.19576271186441" calcext:value-type="float">
            <text:p>8.20</text:p>
          </table:table-cell>
          <table:table-cell table:style-name="ce255" table:formula="of:=+[.F13]" office:value-type="float" office:value="8.19576271186441" calcext:value-type="float">
            <text:p>8.20</text:p>
          </table:table-cell>
          <table:table-cell table:style-name="ce255" table:formula="of:=+[.G13]" office:value-type="float" office:value="8.19576271186441" calcext:value-type="float">
            <text:p>8.20</text:p>
          </table:table-cell>
          <table:table-cell table:style-name="ce255" table:formula="of:=+[.H13]" office:value-type="float" office:value="8.19576271186441" calcext:value-type="float">
            <text:p>8.20</text:p>
          </table:table-cell>
          <table:table-cell table:style-name="ce255" table:formula="of:=+[.I13]" office:value-type="float" office:value="8.19576271186441" calcext:value-type="float">
            <text:p>8.20</text:p>
          </table:table-cell>
          <table:table-cell table:style-name="ce255" table:formula="of:=+[.J13]" office:value-type="float" office:value="8.19576271186441" calcext:value-type="float">
            <text:p>8.20</text:p>
          </table:table-cell>
          <table:table-cell table:style-name="ce255" table:formula="of:=+[.K13]" office:value-type="float" office:value="8.19576271186441" calcext:value-type="float">
            <text:p>8.20</text:p>
          </table:table-cell>
          <table:table-cell table:style-name="ce255" table:formula="of:=+[.L13]" office:value-type="float" office:value="8.19576271186441" calcext:value-type="float">
            <text:p>8.20</text:p>
          </table:table-cell>
          <table:table-cell table:style-name="ce255" table:formula="of:=+[.M13]" office:value-type="float" office:value="8.19576271186441" calcext:value-type="float">
            <text:p>8.20</text:p>
          </table:table-cell>
          <table:table-cell table:style-name="ce255" table:formula="of:=+[.N13]" office:value-type="float" office:value="8.19576271186441" calcext:value-type="float">
            <text:p>8.20</text:p>
          </table:table-cell>
          <table:table-cell table:style-name="ce255" table:formula="of:=+[.O13]" office:value-type="float" office:value="8.19576271186441" calcext:value-type="float">
            <text:p>8.20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valor de compra G95</text:p>
          </table:table-cell>
          <table:table-cell table:style-name="ce241"/>
          <table:table-cell table:style-name="ce255" table:formula="of:=+[.D14]" office:value-type="float" office:value="8.45338983050847" calcext:value-type="float">
            <text:p>8.45</text:p>
          </table:table-cell>
          <table:table-cell table:style-name="ce255" table:formula="of:=+[.E14]" office:value-type="float" office:value="8.45338983050847" calcext:value-type="float">
            <text:p>8.45</text:p>
          </table:table-cell>
          <table:table-cell table:style-name="ce255" table:formula="of:=+[.F14]" office:value-type="float" office:value="8.45338983050847" calcext:value-type="float">
            <text:p>8.45</text:p>
          </table:table-cell>
          <table:table-cell table:style-name="ce255" table:formula="of:=+[.G14]" office:value-type="float" office:value="8.45338983050847" calcext:value-type="float">
            <text:p>8.45</text:p>
          </table:table-cell>
          <table:table-cell table:style-name="ce255" table:formula="of:=+[.H14]" office:value-type="float" office:value="8.45338983050847" calcext:value-type="float">
            <text:p>8.45</text:p>
          </table:table-cell>
          <table:table-cell table:style-name="ce255" table:formula="of:=+[.I14]" office:value-type="float" office:value="8.45338983050847" calcext:value-type="float">
            <text:p>8.45</text:p>
          </table:table-cell>
          <table:table-cell table:style-name="ce255" table:formula="of:=+[.J14]" office:value-type="float" office:value="8.45338983050847" calcext:value-type="float">
            <text:p>8.45</text:p>
          </table:table-cell>
          <table:table-cell table:style-name="ce255" table:formula="of:=+[.K14]" office:value-type="float" office:value="8.45338983050847" calcext:value-type="float">
            <text:p>8.45</text:p>
          </table:table-cell>
          <table:table-cell table:style-name="ce255" table:formula="of:=+[.L14]" office:value-type="float" office:value="8.45338983050847" calcext:value-type="float">
            <text:p>8.45</text:p>
          </table:table-cell>
          <table:table-cell table:style-name="ce255" table:formula="of:=+[.M14]" office:value-type="float" office:value="8.45338983050847" calcext:value-type="float">
            <text:p>8.45</text:p>
          </table:table-cell>
          <table:table-cell table:style-name="ce255" table:formula="of:=+[.N14]" office:value-type="float" office:value="8.45338983050847" calcext:value-type="float">
            <text:p>8.45</text:p>
          </table:table-cell>
          <table:table-cell table:style-name="ce255" table:formula="of:=+[.O14]" office:value-type="float" office:value="8.45338983050847" calcext:value-type="float">
            <text:p>8.45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Capital de Trabajo</text:p>
          </table:table-cell>
          <table:table-cell table:style-name="ce248"/>
          <table:table-cell table:style-name="ce248" table:formula="of:=+[.D21]*[.D24]+[.D22]*[.D25]+[.D23]*[.D26]" office:value-type="float" office:value="36975.1540155176" calcext:value-type="float">
            <text:p>36975</text:p>
          </table:table-cell>
          <table:table-cell table:style-name="ce248" table:formula="of:=+[.E21]*[.E24]+[.E22]*[.E25]+[.E23]*[.E26]" office:value-type="float" office:value="37327.575241867" calcext:value-type="float">
            <text:p>37328</text:p>
          </table:table-cell>
          <table:table-cell table:style-name="ce248" table:formula="of:=+[.F21]*[.F24]+[.F22]*[.F25]+[.F23]*[.F26]" office:value-type="float" office:value="37856.2070813912" calcext:value-type="float">
            <text:p>37856</text:p>
          </table:table-cell>
          <table:table-cell table:style-name="ce248" table:formula="of:=+[.G21]*[.G24]+[.G22]*[.G25]+[.G23]*[.G26]" office:value-type="float" office:value="37870.7444569781" calcext:value-type="float">
            <text:p>37871</text:p>
          </table:table-cell>
          <table:table-cell table:style-name="ce248" table:formula="of:=+[.H21]*[.H24]+[.H22]*[.H25]+[.H23]*[.H26]" office:value-type="float" office:value="37345.0200925713" calcext:value-type="float">
            <text:p>37345</text:p>
          </table:table-cell>
          <table:table-cell table:style-name="ce248" table:formula="of:=+[.I21]*[.I24]+[.I22]*[.I25]+[.I23]*[.I26]" office:value-type="float" office:value="36726.8292089011" calcext:value-type="float">
            <text:p>36727</text:p>
          </table:table-cell>
          <table:table-cell table:style-name="ce248" table:formula="of:=+[.J21]*[.J24]+[.J22]*[.J25]+[.J23]*[.J26]" office:value-type="float" office:value="66960.0330063939" calcext:value-type="float">
            <text:p>66960</text:p>
          </table:table-cell>
          <table:table-cell table:style-name="ce248" table:formula="of:=+[.K21]*[.K24]+[.K22]*[.K25]+[.K23]*[.K26]" office:value-type="float" office:value="39676.462715486" calcext:value-type="float">
            <text:p>39676</text:p>
          </table:table-cell>
          <table:table-cell table:style-name="ce248" table:formula="of:=+[.L21]*[.L24]+[.L22]*[.L25]+[.L23]*[.L26]" office:value-type="float" office:value="40205.0945550102" calcext:value-type="float">
            <text:p>40205</text:p>
          </table:table-cell>
          <table:table-cell table:style-name="ce248" table:formula="of:=+[.M21]*[.M24]+[.M22]*[.M25]+[.M23]*[.M26]" office:value-type="float" office:value="40293.1998615975" calcext:value-type="float">
            <text:p>40293</text:p>
          </table:table-cell>
          <table:table-cell table:style-name="ce248" table:formula="of:=+[.N21]*[.N24]+[.N22]*[.N25]+[.N23]*[.N26]" office:value-type="float" office:value="44003.7989011775" calcext:value-type="float">
            <text:p>44004</text:p>
          </table:table-cell>
          <table:table-cell table:style-name="ce248" table:formula="of:=+[.O21]*[.O24]+[.O22]*[.O25]+[.O23]*[.O26]" office:value-type="float" office:value="70484.2452698883" calcext:value-type="float">
            <text:p>70484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Variacion KW</text:p>
          </table:table-cell>
          <table:table-cell table:style-name="ce249" table:formula="of:=[.D27]-[.O15]" office:value-type="float" office:value="-26395.4180290326" calcext:value-type="float">
            <text:p>-26395</text:p>
          </table:table-cell>
          <table:table-cell table:style-name="ce248" table:formula="of:=+[.E27]-[.D27]" office:value-type="float" office:value="352.421226349456" calcext:value-type="float">
            <text:p>352</text:p>
          </table:table-cell>
          <table:table-cell table:style-name="ce248" table:formula="of:=+[.F27]-[.E27]" office:value-type="float" office:value="528.631839524154" calcext:value-type="float">
            <text:p>529</text:p>
          </table:table-cell>
          <table:table-cell table:style-name="ce248" table:formula="of:=+[.G27]-[.F27]" office:value-type="float" office:value="14.5373755869005" calcext:value-type="float">
            <text:p>15</text:p>
          </table:table-cell>
          <table:table-cell table:style-name="ce248" table:formula="of:=+[.H27]-[.G27]" office:value-type="float" office:value="-525.724364406771" calcext:value-type="float">
            <text:p>-526</text:p>
          </table:table-cell>
          <table:table-cell table:style-name="ce248" table:formula="of:=+[.I27]-[.H27]" office:value-type="float" office:value="-618.190883670213" calcext:value-type="float">
            <text:p>-618</text:p>
          </table:table-cell>
          <table:table-cell table:style-name="ce248" table:formula="of:=+[.J27]-[.I27]" office:value-type="float" office:value="30233.2037974929" calcext:value-type="float">
            <text:p>30233</text:p>
          </table:table-cell>
          <table:table-cell table:style-name="ce248" table:formula="of:=+[.K27]-[.J27]" office:value-type="float" office:value="-27283.5702909079" calcext:value-type="float">
            <text:p>-27284</text:p>
          </table:table-cell>
          <table:table-cell table:style-name="ce248" table:formula="of:=+[.L27]-[.K27]" office:value-type="float" office:value="528.631839524154" calcext:value-type="float">
            <text:p>529</text:p>
          </table:table-cell>
          <table:table-cell table:style-name="ce248" table:formula="of:=+[.M27]-[.L27]" office:value-type="float" office:value="88.1053065873421" calcext:value-type="float">
            <text:p>88</text:p>
          </table:table-cell>
          <table:table-cell table:style-name="ce248" table:formula="of:=+[.N27]-[.M27]" office:value-type="float" office:value="3710.59903957995" calcext:value-type="float">
            <text:p>3711</text:p>
          </table:table-cell>
          <table:table-cell table:style-name="ce248" table:formula="of:=+[.O27]-[.N27]" office:value-type="float" office:value="26480.4463687108" calcext:value-type="float">
            <text:p>26480</text:p>
          </table:table-cell>
          <table:table-cell table:style-name="ce248"/>
          <table:table-cell table:style-name="ce261" table:formula="of:=SUM([.C28:.O28])" office:value-type="float" office:value="7113.67322533821" calcext:value-type="float">
            <text:p>7114</text:p>
          </table:table-cell>
          <table:table-cell office:value-type="float" office:value="2" calcext:value-type="float">
            <text:p>2</text:p>
          </table:table-cell>
          <table:table-cell table:number-columns-repeated="16367"/>
        </table:table-row>
        <table:table-row table:style-name="ro9">
          <table:table-cell/>
          <table:table-cell table:style-name="ce242" office:value-type="string" calcext:value-type="string">
            <text:p>TOTAL</text:p>
          </table:table-cell>
          <table:table-cell table:style-name="ce241"/>
          <table:table-cell table:style-name="ce248" table:formula="of:=SUM([.D27:.D28])" office:value-type="float" office:value="37327.575241867" calcext:value-type="float">
            <text:p>37328</text:p>
          </table:table-cell>
          <table:table-cell table:style-name="ce248" table:formula="of:=SUM([.E27:.E28])" office:value-type="float" office:value="37856.2070813912" calcext:value-type="float">
            <text:p>37856</text:p>
          </table:table-cell>
          <table:table-cell table:style-name="ce248" table:formula="of:=SUM([.F27:.F28])" office:value-type="float" office:value="37870.7444569781" calcext:value-type="float">
            <text:p>37871</text:p>
          </table:table-cell>
          <table:table-cell table:style-name="ce248" table:formula="of:=SUM([.G27:.G28])" office:value-type="float" office:value="37345.0200925713" calcext:value-type="float">
            <text:p>37345</text:p>
          </table:table-cell>
          <table:table-cell table:style-name="ce248" table:formula="of:=SUM([.H27:.H28])" office:value-type="float" office:value="36726.8292089011" calcext:value-type="float">
            <text:p>36727</text:p>
          </table:table-cell>
          <table:table-cell table:style-name="ce248" table:formula="of:=SUM([.I27:.I28])" office:value-type="float" office:value="66960.0330063939" calcext:value-type="float">
            <text:p>66960</text:p>
          </table:table-cell>
          <table:table-cell table:style-name="ce248" table:formula="of:=SUM([.J27:.J28])" office:value-type="float" office:value="39676.462715486" calcext:value-type="float">
            <text:p>39676</text:p>
          </table:table-cell>
          <table:table-cell table:style-name="ce248" table:formula="of:=SUM([.K27:.K28])" office:value-type="float" office:value="40205.0945550102" calcext:value-type="float">
            <text:p>40205</text:p>
          </table:table-cell>
          <table:table-cell table:style-name="ce248" table:formula="of:=SUM([.L27:.L28])" office:value-type="float" office:value="40293.1998615975" calcext:value-type="float">
            <text:p>40293</text:p>
          </table:table-cell>
          <table:table-cell table:style-name="ce248" table:formula="of:=SUM([.M27:.M28])" office:value-type="float" office:value="44003.7989011775" calcext:value-type="float">
            <text:p>44004</text:p>
          </table:table-cell>
          <table:table-cell table:style-name="ce248" table:formula="of:=SUM([.N27:.N28])" office:value-type="float" office:value="70484.2452698883" calcext:value-type="float">
            <text:p>70484</text:p>
          </table:table-cell>
          <table:table-cell table:style-name="ce248" table:formula="of:=SUM([.O27:.O28])" office:value-type="float" office:value="70484.2452698883" calcext:value-type="float">
            <text:p>70484</text:p>
          </table:table-cell>
          <table:table-cell table:style-name="ce246"/>
          <table:table-cell table:number-columns-repeated="16368"/>
        </table:table-row>
        <table:table-row table:style-name="ro9">
          <table:table-cell table:number-columns-repeated="2"/>
          <table:table-cell table:style-name="ce250"/>
          <table:table-cell table:number-columns-repeated="16381"/>
        </table:table-row>
        <table:table-row table:style-name="ro9">
          <table:table-cell/>
          <table:table-cell table:style-name="ce239" office:value-type="string" calcext:value-type="string" table:number-columns-spanned="1" table:number-rows-spanned="2">
            <text:p>RUBRO</text:p>
          </table:table-cell>
          <table:table-cell table:style-name="ce239" office:value-type="float" office:value="2" calcext:value-type="float" table:number-columns-spanned="1" table:number-rows-spanned="2">
            <text:p>2</text:p>
          </table:table-cell>
          <table:table-cell table:style-name="ce239" office:value-type="string" calcext:value-type="string" table:number-columns-spanned="12" table:number-rows-spanned="1">
            <text:p>AÑO 3</text:p>
          </table:table-cell>
          <table:covered-table-cell table:number-columns-repeated="11" table:style-name="ce240"/>
          <table:table-cell table:style-name="ce259" office:value-type="string" calcext:value-type="string">
            <text:p>Total</text:p>
          </table:table-cell>
          <table:table-cell table:number-columns-repeated="16368"/>
        </table:table-row>
        <table:table-row table:style-name="ro9">
          <table:table-cell/>
          <table:covered-table-cell table:number-columns-repeated="2" table:style-name="ce240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62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DIESEL B5</text:p>
          </table:table-cell>
          <table:table-cell table:style-name="ce241"/>
          <table:table-cell table:style-name="ce254" table:formula="of:=+[$'Presupuesto de ventas'.C15]/2" office:value-type="float" office:value="2445.78921568627" calcext:value-type="float">
            <text:p>2,446</text:p>
          </table:table-cell>
          <table:table-cell table:style-name="ce254" table:formula="of:=+[$'Presupuesto de ventas'.D15]/2" office:value-type="float" office:value="2469.10076252723" calcext:value-type="float">
            <text:p>2,469</text:p>
          </table:table-cell>
          <table:table-cell table:style-name="ce254" table:formula="of:=+[$'Presupuesto de ventas'.E15]/2" office:value-type="float" office:value="2504.06808278867" calcext:value-type="float">
            <text:p>2,504</text:p>
          </table:table-cell>
          <table:table-cell table:style-name="ce254" table:formula="of:=+[$'Presupuesto de ventas'.F15]/2" office:value-type="float" office:value="2505.02968409586" calcext:value-type="float">
            <text:p>2,505</text:p>
          </table:table-cell>
          <table:table-cell table:style-name="ce254" table:formula="of:=+[$'Presupuesto de ventas'.G15]/2" office:value-type="float" office:value="2470.25468409586" calcext:value-type="float">
            <text:p>2,470</text:p>
          </table:table-cell>
          <table:table-cell table:style-name="ce254" table:formula="of:=+[$'Presupuesto de ventas'.H15]/2" office:value-type="float" office:value="2429.36331699346" calcext:value-type="float">
            <text:p>2,429</text:p>
          </table:table-cell>
          <table:table-cell table:style-name="ce254" table:formula="of:=+[$'Presupuesto de ventas'.I15]/2" office:value-type="float" office:value="4429.19389978214" calcext:value-type="float">
            <text:p>4,429</text:p>
          </table:table-cell>
          <table:table-cell table:style-name="ce254" table:formula="of:=+[$'Presupuesto de ventas'.J15]/2" office:value-type="float" office:value="2624.47222222222" calcext:value-type="float">
            <text:p>2,624</text:p>
          </table:table-cell>
          <table:table-cell table:style-name="ce254" table:formula="of:=+[$'Presupuesto de ventas'.K15]/2" office:value-type="float" office:value="2659.43954248366" calcext:value-type="float">
            <text:p>2,659</text:p>
          </table:table-cell>
          <table:table-cell table:style-name="ce254" table:formula="of:=+[$'Presupuesto de ventas'.L15]/2" office:value-type="float" office:value="2665.2674291939" calcext:value-type="float">
            <text:p>2,665</text:p>
          </table:table-cell>
          <table:table-cell table:style-name="ce254" table:formula="of:=+[$'Presupuesto de ventas'.M15]/2" office:value-type="float" office:value="2910.711791939" calcext:value-type="float">
            <text:p>2,911</text:p>
          </table:table-cell>
          <table:table-cell table:style-name="ce254" table:formula="of:=+[$'Presupuesto de ventas'.N15]/2" office:value-type="float" office:value="4662.30936819172" calcext:value-type="float">
            <text:p>4,662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GASOGHOL 90</text:p>
          </table:table-cell>
          <table:table-cell table:style-name="ce241"/>
          <table:table-cell table:style-name="ce254" table:formula="of:=+[$'Presupuesto de ventas'.C30]/2" office:value-type="float" office:value="1956.63137254902" calcext:value-type="float">
            <text:p>1,957</text:p>
          </table:table-cell>
          <table:table-cell table:style-name="ce254" table:formula="of:=+[$'Presupuesto de ventas'.D30]/2" office:value-type="float" office:value="1975.28061002179" calcext:value-type="float">
            <text:p>1,975</text:p>
          </table:table-cell>
          <table:table-cell table:style-name="ce254" table:formula="of:=+[$'Presupuesto de ventas'.E30]/2" office:value-type="float" office:value="2003.25446623094" calcext:value-type="float">
            <text:p>2,003</text:p>
          </table:table-cell>
          <table:table-cell table:style-name="ce254" table:formula="of:=+[$'Presupuesto de ventas'.F30]/2" office:value-type="float" office:value="2004.02374727669" calcext:value-type="float">
            <text:p>2,004</text:p>
          </table:table-cell>
          <table:table-cell table:style-name="ce254" table:formula="of:=+[$'Presupuesto de ventas'.G30]/2" office:value-type="float" office:value="1976.20374727669" calcext:value-type="float">
            <text:p>1,976</text:p>
          </table:table-cell>
          <table:table-cell table:style-name="ce254" table:formula="of:=+[$'Presupuesto de ventas'.H30]/2" office:value-type="float" office:value="1943.49065359477" calcext:value-type="float">
            <text:p>1,943</text:p>
          </table:table-cell>
          <table:table-cell table:style-name="ce254" table:formula="of:=+[$'Presupuesto de ventas'.I30]/2" office:value-type="float" office:value="3543.35511982571" calcext:value-type="float">
            <text:p>3,543</text:p>
          </table:table-cell>
          <table:table-cell table:style-name="ce254" table:formula="of:=+[$'Presupuesto de ventas'.J30]/2" office:value-type="float" office:value="2099.57777777778" calcext:value-type="float">
            <text:p>2,100</text:p>
          </table:table-cell>
          <table:table-cell table:style-name="ce254" table:formula="of:=+[$'Presupuesto de ventas'.K30]/2" office:value-type="float" office:value="2127.55163398693" calcext:value-type="float">
            <text:p>2,128</text:p>
          </table:table-cell>
          <table:table-cell table:style-name="ce254" table:formula="of:=+[$'Presupuesto de ventas'.L30]/2" office:value-type="float" office:value="2132.21394335512" calcext:value-type="float">
            <text:p>2,132</text:p>
          </table:table-cell>
          <table:table-cell table:style-name="ce254" table:formula="of:=+[$'Presupuesto de ventas'.M30]/2" office:value-type="float" office:value="2328.5694335512" calcext:value-type="float">
            <text:p>2,329</text:p>
          </table:table-cell>
          <table:table-cell table:style-name="ce254" table:formula="of:=+[$'Presupuesto de ventas'.N30]/2" office:value-type="float" office:value="3729.84749455338" calcext:value-type="float">
            <text:p>3,730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GASOHOL 95</text:p>
          </table:table-cell>
          <table:table-cell table:style-name="ce241"/>
          <table:table-cell table:style-name="ce254" table:formula="of:=+[$'Presupuesto de ventas'.C45]/2" office:value-type="float" office:value="451.530316742082" calcext:value-type="float">
            <text:p>452</text:p>
          </table:table-cell>
          <table:table-cell table:style-name="ce254" table:formula="of:=+[$'Presupuesto de ventas'.D45]/2" office:value-type="float" office:value="455.833986928105" calcext:value-type="float">
            <text:p>456</text:p>
          </table:table-cell>
          <table:table-cell table:style-name="ce254" table:formula="of:=+[$'Presupuesto de ventas'.E45]/2" office:value-type="float" office:value="462.289492207139" calcext:value-type="float">
            <text:p>462</text:p>
          </table:table-cell>
          <table:table-cell table:style-name="ce254" table:formula="of:=+[$'Presupuesto de ventas'.F45]/2" office:value-type="float" office:value="462.467018602313" calcext:value-type="float">
            <text:p>462</text:p>
          </table:table-cell>
          <table:table-cell table:style-name="ce254" table:formula="of:=+[$'Presupuesto de ventas'.G45]/2" office:value-type="float" office:value="456.047018602313" calcext:value-type="float">
            <text:p>456</text:p>
          </table:table-cell>
          <table:table-cell table:style-name="ce254" table:formula="of:=+[$'Presupuesto de ventas'.H45]/2" office:value-type="float" office:value="448.497843137255" calcext:value-type="float">
            <text:p>448</text:p>
          </table:table-cell>
          <table:table-cell table:style-name="ce254" table:formula="of:=+[$'Presupuesto de ventas'.I45]/2" office:value-type="float" office:value="817.697335344394" calcext:value-type="float">
            <text:p>818</text:p>
          </table:table-cell>
          <table:table-cell table:style-name="ce254" table:formula="of:=+[$'Presupuesto de ventas'.J45]/2" office:value-type="float" office:value="484.517948717949" calcext:value-type="float">
            <text:p>485</text:p>
          </table:table-cell>
          <table:table-cell table:style-name="ce254" table:formula="of:=+[$'Presupuesto de ventas'.K45]/2" office:value-type="float" office:value="490.973453996984" calcext:value-type="float">
            <text:p>491</text:p>
          </table:table-cell>
          <table:table-cell table:style-name="ce254" table:formula="of:=+[$'Presupuesto de ventas'.L45]/2" office:value-type="float" office:value="492.049371543489" calcext:value-type="float">
            <text:p>492</text:p>
          </table:table-cell>
          <table:table-cell table:style-name="ce254" table:formula="of:=+[$'Presupuesto de ventas'.M45]/2" office:value-type="float" office:value="537.362176973353" calcext:value-type="float">
            <text:p>537</text:p>
          </table:table-cell>
          <table:table-cell table:style-name="ce254" table:formula="of:=+[$'Presupuesto de ventas'.N45]/2" office:value-type="float" office:value="860.734037204625" calcext:value-type="float">
            <text:p>861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valor de compra DB5</text:p>
          </table:table-cell>
          <table:table-cell table:style-name="ce241"/>
          <table:table-cell table:style-name="ce255" table:formula="of:=+[.D24]" office:value-type="float" office:value="8.05889830508475" calcext:value-type="float">
            <text:p>8.06</text:p>
          </table:table-cell>
          <table:table-cell table:style-name="ce255" table:formula="of:=+[.E24]" office:value-type="float" office:value="8.05889830508475" calcext:value-type="float">
            <text:p>8.06</text:p>
          </table:table-cell>
          <table:table-cell table:style-name="ce255" table:formula="of:=+[.F24]" office:value-type="float" office:value="8.05889830508475" calcext:value-type="float">
            <text:p>8.06</text:p>
          </table:table-cell>
          <table:table-cell table:style-name="ce255" table:formula="of:=+[.G24]" office:value-type="float" office:value="8.05889830508475" calcext:value-type="float">
            <text:p>8.06</text:p>
          </table:table-cell>
          <table:table-cell table:style-name="ce255" table:formula="of:=+[.H24]" office:value-type="float" office:value="8.05889830508475" calcext:value-type="float">
            <text:p>8.06</text:p>
          </table:table-cell>
          <table:table-cell table:style-name="ce255" table:formula="of:=+[.I24]" office:value-type="float" office:value="8.05889830508475" calcext:value-type="float">
            <text:p>8.06</text:p>
          </table:table-cell>
          <table:table-cell table:style-name="ce255" table:formula="of:=+[.J24]" office:value-type="float" office:value="8.05889830508475" calcext:value-type="float">
            <text:p>8.06</text:p>
          </table:table-cell>
          <table:table-cell table:style-name="ce255" table:formula="of:=+[.K24]" office:value-type="float" office:value="8.05889830508475" calcext:value-type="float">
            <text:p>8.06</text:p>
          </table:table-cell>
          <table:table-cell table:style-name="ce255" table:formula="of:=+[.L24]" office:value-type="float" office:value="8.05889830508475" calcext:value-type="float">
            <text:p>8.06</text:p>
          </table:table-cell>
          <table:table-cell table:style-name="ce255" table:formula="of:=+[.M24]" office:value-type="float" office:value="8.05889830508475" calcext:value-type="float">
            <text:p>8.06</text:p>
          </table:table-cell>
          <table:table-cell table:style-name="ce255" table:formula="of:=+[.N24]" office:value-type="float" office:value="8.05889830508475" calcext:value-type="float">
            <text:p>8.06</text:p>
          </table:table-cell>
          <table:table-cell table:style-name="ce255" table:formula="of:=+[.O24]" office:value-type="float" office:value="8.05889830508475" calcext:value-type="float">
            <text:p>8.06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valor de compra G90</text:p>
          </table:table-cell>
          <table:table-cell table:style-name="ce241"/>
          <table:table-cell table:style-name="ce255" table:formula="of:=+[.D25]" office:value-type="float" office:value="8.19576271186441" calcext:value-type="float">
            <text:p>8.20</text:p>
          </table:table-cell>
          <table:table-cell table:style-name="ce255" table:formula="of:=+[.E25]" office:value-type="float" office:value="8.19576271186441" calcext:value-type="float">
            <text:p>8.20</text:p>
          </table:table-cell>
          <table:table-cell table:style-name="ce255" table:formula="of:=+[.F25]" office:value-type="float" office:value="8.19576271186441" calcext:value-type="float">
            <text:p>8.20</text:p>
          </table:table-cell>
          <table:table-cell table:style-name="ce255" table:formula="of:=+[.G25]" office:value-type="float" office:value="8.19576271186441" calcext:value-type="float">
            <text:p>8.20</text:p>
          </table:table-cell>
          <table:table-cell table:style-name="ce255" table:formula="of:=+[.H25]" office:value-type="float" office:value="8.19576271186441" calcext:value-type="float">
            <text:p>8.20</text:p>
          </table:table-cell>
          <table:table-cell table:style-name="ce255" table:formula="of:=+[.I25]" office:value-type="float" office:value="8.19576271186441" calcext:value-type="float">
            <text:p>8.20</text:p>
          </table:table-cell>
          <table:table-cell table:style-name="ce255" table:formula="of:=+[.J25]" office:value-type="float" office:value="8.19576271186441" calcext:value-type="float">
            <text:p>8.20</text:p>
          </table:table-cell>
          <table:table-cell table:style-name="ce255" table:formula="of:=+[.K25]" office:value-type="float" office:value="8.19576271186441" calcext:value-type="float">
            <text:p>8.20</text:p>
          </table:table-cell>
          <table:table-cell table:style-name="ce255" table:formula="of:=+[.L25]" office:value-type="float" office:value="8.19576271186441" calcext:value-type="float">
            <text:p>8.20</text:p>
          </table:table-cell>
          <table:table-cell table:style-name="ce255" table:formula="of:=+[.M25]" office:value-type="float" office:value="8.19576271186441" calcext:value-type="float">
            <text:p>8.20</text:p>
          </table:table-cell>
          <table:table-cell table:style-name="ce255" table:formula="of:=+[.N25]" office:value-type="float" office:value="8.19576271186441" calcext:value-type="float">
            <text:p>8.20</text:p>
          </table:table-cell>
          <table:table-cell table:style-name="ce255" table:formula="of:=+[.O25]" office:value-type="float" office:value="8.19576271186441" calcext:value-type="float">
            <text:p>8.20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valor de compra G95</text:p>
          </table:table-cell>
          <table:table-cell table:style-name="ce241"/>
          <table:table-cell table:style-name="ce255" table:formula="of:=+[.D26]" office:value-type="float" office:value="8.45338983050847" calcext:value-type="float">
            <text:p>8.45</text:p>
          </table:table-cell>
          <table:table-cell table:style-name="ce255" table:formula="of:=+[.E26]" office:value-type="float" office:value="8.45338983050847" calcext:value-type="float">
            <text:p>8.45</text:p>
          </table:table-cell>
          <table:table-cell table:style-name="ce255" table:formula="of:=+[.F26]" office:value-type="float" office:value="8.45338983050847" calcext:value-type="float">
            <text:p>8.45</text:p>
          </table:table-cell>
          <table:table-cell table:style-name="ce255" table:formula="of:=+[.G26]" office:value-type="float" office:value="8.45338983050847" calcext:value-type="float">
            <text:p>8.45</text:p>
          </table:table-cell>
          <table:table-cell table:style-name="ce255" table:formula="of:=+[.H26]" office:value-type="float" office:value="8.45338983050847" calcext:value-type="float">
            <text:p>8.45</text:p>
          </table:table-cell>
          <table:table-cell table:style-name="ce255" table:formula="of:=+[.I26]" office:value-type="float" office:value="8.45338983050847" calcext:value-type="float">
            <text:p>8.45</text:p>
          </table:table-cell>
          <table:table-cell table:style-name="ce255" table:formula="of:=+[.J26]" office:value-type="float" office:value="8.45338983050847" calcext:value-type="float">
            <text:p>8.45</text:p>
          </table:table-cell>
          <table:table-cell table:style-name="ce255" table:formula="of:=+[.K26]" office:value-type="float" office:value="8.45338983050847" calcext:value-type="float">
            <text:p>8.45</text:p>
          </table:table-cell>
          <table:table-cell table:style-name="ce255" table:formula="of:=+[.L26]" office:value-type="float" office:value="8.45338983050847" calcext:value-type="float">
            <text:p>8.45</text:p>
          </table:table-cell>
          <table:table-cell table:style-name="ce255" table:formula="of:=+[.M26]" office:value-type="float" office:value="8.45338983050847" calcext:value-type="float">
            <text:p>8.45</text:p>
          </table:table-cell>
          <table:table-cell table:style-name="ce255" table:formula="of:=+[.N26]" office:value-type="float" office:value="8.45338983050847" calcext:value-type="float">
            <text:p>8.45</text:p>
          </table:table-cell>
          <table:table-cell table:style-name="ce255" table:formula="of:=+[.O26]" office:value-type="float" office:value="8.45338983050847" calcext:value-type="float">
            <text:p>8.45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Capital de Trabajo</text:p>
          </table:table-cell>
          <table:table-cell table:style-name="ce248"/>
          <table:table-cell table:style-name="ce248" table:formula="of:=+[.D33]*[.D36]+[.D34]*[.D37]+[.D35]*[.D38]" office:value-type="float" office:value="39563.4147966038" calcext:value-type="float">
            <text:p>39563</text:p>
          </table:table-cell>
          <table:table-cell table:style-name="ce248" table:formula="of:=+[.E33]*[.E36]+[.E34]*[.E37]+[.E35]*[.E38]" office:value-type="float" office:value="39940.5055087977" calcext:value-type="float">
            <text:p>39941</text:p>
          </table:table-cell>
          <table:table-cell table:style-name="ce248" table:formula="of:=+[.F33]*[.F36]+[.F34]*[.F37]+[.F35]*[.F38]" office:value-type="float" office:value="40506.1415770885" calcext:value-type="float">
            <text:p>40506</text:p>
          </table:table-cell>
          <table:table-cell table:style-name="ce248" table:formula="of:=+[.G33]*[.G36]+[.G34]*[.G37]+[.G35]*[.G38]" office:value-type="float" office:value="40521.6965689665" calcext:value-type="float">
            <text:p>40522</text:p>
          </table:table-cell>
          <table:table-cell table:style-name="ce248" table:formula="of:=+[.H33]*[.H36]+[.H34]*[.H37]+[.H35]*[.H38]" office:value-type="float" office:value="39959.1714990513" calcext:value-type="float">
            <text:p>39959</text:p>
          </table:table-cell>
          <table:table-cell table:style-name="ce248" table:formula="of:=+[.I33]*[.I36]+[.I34]*[.I37]+[.I35]*[.I38]" office:value-type="float" office:value="39297.7072535241" calcext:value-type="float">
            <text:p>39298</text:p>
          </table:table-cell>
          <table:table-cell table:style-name="ce248" table:formula="of:=+[.J33]*[.J36]+[.J34]*[.J37]+[.J35]*[.J38]" office:value-type="float" office:value="71647.2353168415" calcext:value-type="float">
            <text:p>71647</text:p>
          </table:table-cell>
          <table:table-cell table:style-name="ce248" table:formula="of:=+[.K33]*[.K36]+[.K34]*[.K37]+[.K35]*[.K38]" office:value-type="float" office:value="42453.8151055701" calcext:value-type="float">
            <text:p>42454</text:p>
          </table:table-cell>
          <table:table-cell table:style-name="ce248" table:formula="of:=+[.L33]*[.L36]+[.L34]*[.L37]+[.L35]*[.L38]" office:value-type="float" office:value="43019.4511738609" calcext:value-type="float">
            <text:p>43019</text:p>
          </table:table-cell>
          <table:table-cell table:style-name="ce248" table:formula="of:=+[.M33]*[.M36]+[.M34]*[.M37]+[.M35]*[.M38]" office:value-type="float" office:value="43113.7238519094" calcext:value-type="float">
            <text:p>43114</text:p>
          </table:table-cell>
          <table:table-cell table:style-name="ce248" table:formula="of:=+[.N33]*[.N36]+[.N34]*[.N37]+[.N35]*[.N38]" office:value-type="float" office:value="47084.0648242599" calcext:value-type="float">
            <text:p>47084</text:p>
          </table:table-cell>
          <table:table-cell table:style-name="ce248" table:formula="of:=+[.O33]*[.O36]+[.O34]*[.O37]+[.O35]*[.O38]" office:value-type="float" office:value="75418.1424387805" calcext:value-type="float">
            <text:p>75418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Variacion KW</text:p>
          </table:table-cell>
          <table:table-cell table:style-name="ce249" table:formula="of:=[.D39]-[.O27]" office:value-type="float" office:value="-30920.8304732846" calcext:value-type="float">
            <text:p>-30921</text:p>
          </table:table-cell>
          <table:table-cell table:style-name="ce248" table:formula="of:=+[.E39]-[.D39]" office:value-type="float" office:value="377.090712193924" calcext:value-type="float">
            <text:p>377</text:p>
          </table:table-cell>
          <table:table-cell table:style-name="ce248" table:formula="of:=+[.F39]-[.E39]" office:value-type="float" office:value="565.636068290842" calcext:value-type="float">
            <text:p>566</text:p>
          </table:table-cell>
          <table:table-cell table:style-name="ce248" table:formula="of:=+[.G39]-[.F39]" office:value-type="float" office:value="15.5549918779871" calcext:value-type="float">
            <text:p>16</text:p>
          </table:table-cell>
          <table:table-cell table:style-name="ce248" table:formula="of:=+[.H39]-[.G39]" office:value-type="float" office:value="-562.525069915253" calcext:value-type="float">
            <text:p>-563</text:p>
          </table:table-cell>
          <table:table-cell table:style-name="ce248" table:formula="of:=+[.I39]-[.H39]" office:value-type="float" office:value="-661.464245527131" calcext:value-type="float">
            <text:p>-661</text:p>
          </table:table-cell>
          <table:table-cell table:style-name="ce248" table:formula="of:=+[.J39]-[.I39]" office:value-type="float" office:value="32349.5280633174" calcext:value-type="float">
            <text:p>32350</text:p>
          </table:table-cell>
          <table:table-cell table:style-name="ce248" table:formula="of:=+[.K39]-[.J39]" office:value-type="float" office:value="-29193.4202112715" calcext:value-type="float">
            <text:p>-29193</text:p>
          </table:table-cell>
          <table:table-cell table:style-name="ce248" table:formula="of:=+[.L39]-[.K39]" office:value-type="float" office:value="565.636068290834" calcext:value-type="float">
            <text:p>566</text:p>
          </table:table-cell>
          <table:table-cell table:style-name="ce248" table:formula="of:=+[.M39]-[.L39]" office:value-type="float" office:value="94.2726780484663" calcext:value-type="float">
            <text:p>94</text:p>
          </table:table-cell>
          <table:table-cell table:style-name="ce248" table:formula="of:=+[.N39]-[.M39]" office:value-type="float" office:value="3970.34097235054" calcext:value-type="float">
            <text:p>3970</text:p>
          </table:table-cell>
          <table:table-cell table:style-name="ce248" table:formula="of:=+[.O39]-[.N39]" office:value-type="float" office:value="28334.0776145206" calcext:value-type="float">
            <text:p>28334</text:p>
          </table:table-cell>
          <table:table-cell table:style-name="ce248"/>
          <table:table-cell table:style-name="ce261" table:formula="of:=SUM([.C40:.N40])" office:value-type="float" office:value="4933.89716889219" calcext:value-type="float">
            <text:p>4934</text:p>
          </table:table-cell>
          <table:table-cell office:value-type="float" office:value="3" calcext:value-type="float">
            <text:p>3</text:p>
          </table:table-cell>
          <table:table-cell table:number-columns-repeated="16367"/>
        </table:table-row>
        <table:table-row table:style-name="ro9">
          <table:table-cell/>
          <table:table-cell table:style-name="ce242" office:value-type="string" calcext:value-type="string">
            <text:p>TOTAL</text:p>
          </table:table-cell>
          <table:table-cell table:style-name="ce241"/>
          <table:table-cell table:style-name="ce248" table:formula="of:=SUM([.D39:.D40])" office:value-type="float" office:value="39940.5055087977" calcext:value-type="float">
            <text:p>39941</text:p>
          </table:table-cell>
          <table:table-cell table:style-name="ce248" table:formula="of:=SUM([.E39:.E40])" office:value-type="float" office:value="40506.1415770885" calcext:value-type="float">
            <text:p>40506</text:p>
          </table:table-cell>
          <table:table-cell table:style-name="ce248" table:formula="of:=SUM([.F39:.F40])" office:value-type="float" office:value="40521.6965689665" calcext:value-type="float">
            <text:p>40522</text:p>
          </table:table-cell>
          <table:table-cell table:style-name="ce248" table:formula="of:=SUM([.G39:.G40])" office:value-type="float" office:value="39959.1714990513" calcext:value-type="float">
            <text:p>39959</text:p>
          </table:table-cell>
          <table:table-cell table:style-name="ce248" table:formula="of:=SUM([.H39:.H40])" office:value-type="float" office:value="39297.7072535241" calcext:value-type="float">
            <text:p>39298</text:p>
          </table:table-cell>
          <table:table-cell table:style-name="ce248" table:formula="of:=SUM([.I39:.I40])" office:value-type="float" office:value="71647.2353168415" calcext:value-type="float">
            <text:p>71647</text:p>
          </table:table-cell>
          <table:table-cell table:style-name="ce248" table:formula="of:=SUM([.J39:.J40])" office:value-type="float" office:value="42453.8151055701" calcext:value-type="float">
            <text:p>42454</text:p>
          </table:table-cell>
          <table:table-cell table:style-name="ce248" table:formula="of:=SUM([.K39:.K40])" office:value-type="float" office:value="43019.4511738609" calcext:value-type="float">
            <text:p>43019</text:p>
          </table:table-cell>
          <table:table-cell table:style-name="ce248" table:formula="of:=SUM([.L39:.L40])" office:value-type="float" office:value="43113.7238519094" calcext:value-type="float">
            <text:p>43114</text:p>
          </table:table-cell>
          <table:table-cell table:style-name="ce248" table:formula="of:=SUM([.M39:.M40])" office:value-type="float" office:value="47084.0648242599" calcext:value-type="float">
            <text:p>47084</text:p>
          </table:table-cell>
          <table:table-cell table:style-name="ce248" table:formula="of:=SUM([.N39:.N40])" office:value-type="float" office:value="75418.1424387805" calcext:value-type="float">
            <text:p>75418</text:p>
          </table:table-cell>
          <table:table-cell table:style-name="ce248" table:formula="of:=SUM([.O39:.O40])" office:value-type="float" office:value="75418.1424387805" calcext:value-type="float">
            <text:p>75418</text:p>
          </table:table-cell>
          <table:table-cell table:style-name="ce246"/>
          <table:table-cell table:number-columns-repeated="16368"/>
        </table:table-row>
        <table:table-row table:style-name="ro9">
          <table:table-cell table:number-columns-repeated="16384"/>
        </table:table-row>
        <table:table-row table:style-name="ro9">
          <table:table-cell/>
          <table:table-cell table:style-name="ce239" office:value-type="string" calcext:value-type="string" table:number-columns-spanned="1" table:number-rows-spanned="2">
            <text:p>RUBRO</text:p>
          </table:table-cell>
          <table:table-cell table:style-name="ce239" office:value-type="float" office:value="3" calcext:value-type="float" table:number-columns-spanned="1" table:number-rows-spanned="2">
            <text:p>3</text:p>
          </table:table-cell>
          <table:table-cell table:style-name="ce239" office:value-type="string" calcext:value-type="string" table:number-columns-spanned="12" table:number-rows-spanned="1">
            <text:p>AÑO 4</text:p>
          </table:table-cell>
          <table:covered-table-cell table:number-columns-repeated="11" table:style-name="ce240"/>
          <table:table-cell table:style-name="ce259" office:value-type="string" calcext:value-type="string">
            <text:p>Total</text:p>
          </table:table-cell>
          <table:table-cell table:number-columns-repeated="16368"/>
        </table:table-row>
        <table:table-row table:style-name="ro9">
          <table:table-cell/>
          <table:covered-table-cell table:number-columns-repeated="2" table:style-name="ce240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62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DIESEL B5</text:p>
          </table:table-cell>
          <table:table-cell table:style-name="ce241"/>
          <table:table-cell table:style-name="ce254" table:formula="of:=+[$'Presupuesto de ventas'.C16]/2" office:value-type="float" office:value="2616.99446078431" calcext:value-type="float">
            <text:p>2,617</text:p>
          </table:table-cell>
          <table:table-cell table:style-name="ce254" table:formula="of:=+[$'Presupuesto de ventas'.D16]/2" office:value-type="float" office:value="2641.93781590414" calcext:value-type="float">
            <text:p>2,642</text:p>
          </table:table-cell>
          <table:table-cell table:style-name="ce254" table:formula="of:=+[$'Presupuesto de ventas'.E16]/2" office:value-type="float" office:value="2679.35284858388" calcext:value-type="float">
            <text:p>2,679</text:p>
          </table:table-cell>
          <table:table-cell table:style-name="ce254" table:formula="of:=+[$'Presupuesto de ventas'.F16]/2" office:value-type="float" office:value="2680.38176198257" calcext:value-type="float">
            <text:p>2,680</text:p>
          </table:table-cell>
          <table:table-cell table:style-name="ce254" table:formula="of:=+[$'Presupuesto de ventas'.G16]/2" office:value-type="float" office:value="2643.17251198257" calcext:value-type="float">
            <text:p>2,643</text:p>
          </table:table-cell>
          <table:table-cell table:style-name="ce254" table:formula="of:=+[$'Presupuesto de ventas'.H16]/2" office:value-type="float" office:value="2599.41874918301" calcext:value-type="float">
            <text:p>2,599</text:p>
          </table:table-cell>
          <table:table-cell table:style-name="ce254" table:formula="of:=+[$'Presupuesto de ventas'.I16]/2" office:value-type="float" office:value="4739.23747276689" calcext:value-type="float">
            <text:p>4,739</text:p>
          </table:table-cell>
          <table:table-cell table:style-name="ce254" table:formula="of:=+[$'Presupuesto de ventas'.J16]/2" office:value-type="float" office:value="2808.18527777778" calcext:value-type="float">
            <text:p>2,808</text:p>
          </table:table-cell>
          <table:table-cell table:style-name="ce254" table:formula="of:=+[$'Presupuesto de ventas'.K16]/2" office:value-type="float" office:value="2845.60031045752" calcext:value-type="float">
            <text:p>2,846</text:p>
          </table:table-cell>
          <table:table-cell table:style-name="ce254" table:formula="of:=+[$'Presupuesto de ventas'.L16]/2" office:value-type="float" office:value="2851.83614923747" calcext:value-type="float">
            <text:p>2,852</text:p>
          </table:table-cell>
          <table:table-cell table:style-name="ce254" table:formula="of:=+[$'Presupuesto de ventas'.M16]/2" office:value-type="float" office:value="3114.46161737473" calcext:value-type="float">
            <text:p>3,114</text:p>
          </table:table-cell>
          <table:table-cell table:style-name="ce254" table:formula="of:=+[$'Presupuesto de ventas'.N16]/2" office:value-type="float" office:value="4988.67102396514" calcext:value-type="float">
            <text:p>4,989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GASOGHOL 90</text:p>
          </table:table-cell>
          <table:table-cell table:style-name="ce241"/>
          <table:table-cell table:style-name="ce254" table:formula="of:=+[$'Presupuesto de ventas'.C31]/2" office:value-type="float" office:value="2093.59556862745" calcext:value-type="float">
            <text:p>2,094</text:p>
          </table:table-cell>
          <table:table-cell table:style-name="ce254" table:formula="of:=+[$'Presupuesto de ventas'.D31]/2" office:value-type="float" office:value="2113.55025272331" calcext:value-type="float">
            <text:p>2,114</text:p>
          </table:table-cell>
          <table:table-cell table:style-name="ce254" table:formula="of:=+[$'Presupuesto de ventas'.E31]/2" office:value-type="float" office:value="2143.4822788671" calcext:value-type="float">
            <text:p>2,143</text:p>
          </table:table-cell>
          <table:table-cell table:style-name="ce254" table:formula="of:=+[$'Presupuesto de ventas'.F31]/2" office:value-type="float" office:value="2144.30540958606" calcext:value-type="float">
            <text:p>2,144</text:p>
          </table:table-cell>
          <table:table-cell table:style-name="ce254" table:formula="of:=+[$'Presupuesto de ventas'.G31]/2" office:value-type="float" office:value="2114.53800958606" calcext:value-type="float">
            <text:p>2,115</text:p>
          </table:table-cell>
          <table:table-cell table:style-name="ce254" table:formula="of:=+[$'Presupuesto de ventas'.H31]/2" office:value-type="float" office:value="2079.53499934641" calcext:value-type="float">
            <text:p>2,080</text:p>
          </table:table-cell>
          <table:table-cell table:style-name="ce254" table:formula="of:=+[$'Presupuesto de ventas'.I31]/2" office:value-type="float" office:value="3791.38997821351" calcext:value-type="float">
            <text:p>3,791</text:p>
          </table:table-cell>
          <table:table-cell table:style-name="ce254" table:formula="of:=+[$'Presupuesto de ventas'.J31]/2" office:value-type="float" office:value="2246.54822222222" calcext:value-type="float">
            <text:p>2,247</text:p>
          </table:table-cell>
          <table:table-cell table:style-name="ce254" table:formula="of:=+[$'Presupuesto de ventas'.K31]/2" office:value-type="float" office:value="2276.48024836601" calcext:value-type="float">
            <text:p>2,276</text:p>
          </table:table-cell>
          <table:table-cell table:style-name="ce254" table:formula="of:=+[$'Presupuesto de ventas'.L31]/2" office:value-type="float" office:value="2281.46891938998" calcext:value-type="float">
            <text:p>2,281</text:p>
          </table:table-cell>
          <table:table-cell table:style-name="ce254" table:formula="of:=+[$'Presupuesto de ventas'.M31]/2" office:value-type="float" office:value="2491.56929389978" calcext:value-type="float">
            <text:p>2,492</text:p>
          </table:table-cell>
          <table:table-cell table:style-name="ce254" table:formula="of:=+[$'Presupuesto de ventas'.N31]/2" office:value-type="float" office:value="3990.93681917211" calcext:value-type="float">
            <text:p>3,991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GASOHOL 95</text:p>
          </table:table-cell>
          <table:table-cell table:style-name="ce241"/>
          <table:table-cell table:style-name="ce254" table:formula="of:=+[$'Presupuesto de ventas'.C46]/2" office:value-type="float" office:value="483.137438914027" calcext:value-type="float">
            <text:p>483</text:p>
          </table:table-cell>
          <table:table-cell table:style-name="ce254" table:formula="of:=+[$'Presupuesto de ventas'.D46]/2" office:value-type="float" office:value="487.742366013072" calcext:value-type="float">
            <text:p>488</text:p>
          </table:table-cell>
          <table:table-cell table:style-name="ce254" table:formula="of:=+[$'Presupuesto de ventas'.E46]/2" office:value-type="float" office:value="494.649756661639" calcext:value-type="float">
            <text:p>495</text:p>
          </table:table-cell>
          <table:table-cell table:style-name="ce254" table:formula="of:=+[$'Presupuesto de ventas'.F46]/2" office:value-type="float" office:value="494.839709904475" calcext:value-type="float">
            <text:p>495</text:p>
          </table:table-cell>
          <table:table-cell table:style-name="ce254" table:formula="of:=+[$'Presupuesto de ventas'.G46]/2" office:value-type="float" office:value="487.970309904475" calcext:value-type="float">
            <text:p>488</text:p>
          </table:table-cell>
          <table:table-cell table:style-name="ce254" table:formula="of:=+[$'Presupuesto de ventas'.H46]/2" office:value-type="float" office:value="479.892692156863" calcext:value-type="float">
            <text:p>480</text:p>
          </table:table-cell>
          <table:table-cell table:style-name="ce254" table:formula="of:=+[$'Presupuesto de ventas'.I46]/2" office:value-type="float" office:value="874.936148818502" calcext:value-type="float">
            <text:p>875</text:p>
          </table:table-cell>
          <table:table-cell table:style-name="ce254" table:formula="of:=+[$'Presupuesto de ventas'.J46]/2" office:value-type="float" office:value="518.434205128205" calcext:value-type="float">
            <text:p>518</text:p>
          </table:table-cell>
          <table:table-cell table:style-name="ce254" table:formula="of:=+[$'Presupuesto de ventas'.K46]/2" office:value-type="float" office:value="525.341595776772" calcext:value-type="float">
            <text:p>525</text:p>
          </table:table-cell>
          <table:table-cell table:style-name="ce254" table:formula="of:=+[$'Presupuesto de ventas'.L46]/2" office:value-type="float" office:value="526.492827551533" calcext:value-type="float">
            <text:p>526</text:p>
          </table:table-cell>
          <table:table-cell table:style-name="ce254" table:formula="of:=+[$'Presupuesto de ventas'.M46]/2" office:value-type="float" office:value="574.977529361488" calcext:value-type="float">
            <text:p>575</text:p>
          </table:table-cell>
          <table:table-cell table:style-name="ce254" table:formula="of:=+[$'Presupuesto de ventas'.N46]/2" office:value-type="float" office:value="920.985419808949" calcext:value-type="float">
            <text:p>921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valor de compra DB5</text:p>
          </table:table-cell>
          <table:table-cell table:style-name="ce241"/>
          <table:table-cell table:style-name="ce255" table:formula="of:=+[.D36]" office:value-type="float" office:value="8.05889830508475" calcext:value-type="float">
            <text:p>8.06</text:p>
          </table:table-cell>
          <table:table-cell table:style-name="ce255" table:formula="of:=+[.E36]" office:value-type="float" office:value="8.05889830508475" calcext:value-type="float">
            <text:p>8.06</text:p>
          </table:table-cell>
          <table:table-cell table:style-name="ce255" table:formula="of:=+[.F36]" office:value-type="float" office:value="8.05889830508475" calcext:value-type="float">
            <text:p>8.06</text:p>
          </table:table-cell>
          <table:table-cell table:style-name="ce255" table:formula="of:=+[.G36]" office:value-type="float" office:value="8.05889830508475" calcext:value-type="float">
            <text:p>8.06</text:p>
          </table:table-cell>
          <table:table-cell table:style-name="ce255" table:formula="of:=+[.H36]" office:value-type="float" office:value="8.05889830508475" calcext:value-type="float">
            <text:p>8.06</text:p>
          </table:table-cell>
          <table:table-cell table:style-name="ce255" table:formula="of:=+[.I36]" office:value-type="float" office:value="8.05889830508475" calcext:value-type="float">
            <text:p>8.06</text:p>
          </table:table-cell>
          <table:table-cell table:style-name="ce255" table:formula="of:=+[.J36]" office:value-type="float" office:value="8.05889830508475" calcext:value-type="float">
            <text:p>8.06</text:p>
          </table:table-cell>
          <table:table-cell table:style-name="ce255" table:formula="of:=+[.K36]" office:value-type="float" office:value="8.05889830508475" calcext:value-type="float">
            <text:p>8.06</text:p>
          </table:table-cell>
          <table:table-cell table:style-name="ce255" table:formula="of:=+[.L36]" office:value-type="float" office:value="8.05889830508475" calcext:value-type="float">
            <text:p>8.06</text:p>
          </table:table-cell>
          <table:table-cell table:style-name="ce255" table:formula="of:=+[.M36]" office:value-type="float" office:value="8.05889830508475" calcext:value-type="float">
            <text:p>8.06</text:p>
          </table:table-cell>
          <table:table-cell table:style-name="ce255" table:formula="of:=+[.N36]" office:value-type="float" office:value="8.05889830508475" calcext:value-type="float">
            <text:p>8.06</text:p>
          </table:table-cell>
          <table:table-cell table:style-name="ce255" table:formula="of:=+[.O36]" office:value-type="float" office:value="8.05889830508475" calcext:value-type="float">
            <text:p>8.06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valor de compra G90</text:p>
          </table:table-cell>
          <table:table-cell table:style-name="ce241"/>
          <table:table-cell table:style-name="ce255" table:formula="of:=+[.D37]" office:value-type="float" office:value="8.19576271186441" calcext:value-type="float">
            <text:p>8.20</text:p>
          </table:table-cell>
          <table:table-cell table:style-name="ce255" table:formula="of:=+[.E37]" office:value-type="float" office:value="8.19576271186441" calcext:value-type="float">
            <text:p>8.20</text:p>
          </table:table-cell>
          <table:table-cell table:style-name="ce255" table:formula="of:=+[.F37]" office:value-type="float" office:value="8.19576271186441" calcext:value-type="float">
            <text:p>8.20</text:p>
          </table:table-cell>
          <table:table-cell table:style-name="ce255" table:formula="of:=+[.G37]" office:value-type="float" office:value="8.19576271186441" calcext:value-type="float">
            <text:p>8.20</text:p>
          </table:table-cell>
          <table:table-cell table:style-name="ce255" table:formula="of:=+[.H37]" office:value-type="float" office:value="8.19576271186441" calcext:value-type="float">
            <text:p>8.20</text:p>
          </table:table-cell>
          <table:table-cell table:style-name="ce255" table:formula="of:=+[.I37]" office:value-type="float" office:value="8.19576271186441" calcext:value-type="float">
            <text:p>8.20</text:p>
          </table:table-cell>
          <table:table-cell table:style-name="ce255" table:formula="of:=+[.J37]" office:value-type="float" office:value="8.19576271186441" calcext:value-type="float">
            <text:p>8.20</text:p>
          </table:table-cell>
          <table:table-cell table:style-name="ce255" table:formula="of:=+[.K37]" office:value-type="float" office:value="8.19576271186441" calcext:value-type="float">
            <text:p>8.20</text:p>
          </table:table-cell>
          <table:table-cell table:style-name="ce255" table:formula="of:=+[.L37]" office:value-type="float" office:value="8.19576271186441" calcext:value-type="float">
            <text:p>8.20</text:p>
          </table:table-cell>
          <table:table-cell table:style-name="ce255" table:formula="of:=+[.M37]" office:value-type="float" office:value="8.19576271186441" calcext:value-type="float">
            <text:p>8.20</text:p>
          </table:table-cell>
          <table:table-cell table:style-name="ce255" table:formula="of:=+[.N37]" office:value-type="float" office:value="8.19576271186441" calcext:value-type="float">
            <text:p>8.20</text:p>
          </table:table-cell>
          <table:table-cell table:style-name="ce255" table:formula="of:=+[.O37]" office:value-type="float" office:value="8.19576271186441" calcext:value-type="float">
            <text:p>8.20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valor de compra G95</text:p>
          </table:table-cell>
          <table:table-cell table:style-name="ce241"/>
          <table:table-cell table:style-name="ce255" table:formula="of:=+[.D38]" office:value-type="float" office:value="8.45338983050847" calcext:value-type="float">
            <text:p>8.45</text:p>
          </table:table-cell>
          <table:table-cell table:style-name="ce255" table:formula="of:=+[.E38]" office:value-type="float" office:value="8.45338983050847" calcext:value-type="float">
            <text:p>8.45</text:p>
          </table:table-cell>
          <table:table-cell table:style-name="ce255" table:formula="of:=+[.F38]" office:value-type="float" office:value="8.45338983050847" calcext:value-type="float">
            <text:p>8.45</text:p>
          </table:table-cell>
          <table:table-cell table:style-name="ce255" table:formula="of:=+[.G38]" office:value-type="float" office:value="8.45338983050847" calcext:value-type="float">
            <text:p>8.45</text:p>
          </table:table-cell>
          <table:table-cell table:style-name="ce255" table:formula="of:=+[.H38]" office:value-type="float" office:value="8.45338983050847" calcext:value-type="float">
            <text:p>8.45</text:p>
          </table:table-cell>
          <table:table-cell table:style-name="ce255" table:formula="of:=+[.I38]" office:value-type="float" office:value="8.45338983050847" calcext:value-type="float">
            <text:p>8.45</text:p>
          </table:table-cell>
          <table:table-cell table:style-name="ce255" table:formula="of:=+[.J38]" office:value-type="float" office:value="8.45338983050847" calcext:value-type="float">
            <text:p>8.45</text:p>
          </table:table-cell>
          <table:table-cell table:style-name="ce255" table:formula="of:=+[.K38]" office:value-type="float" office:value="8.45338983050847" calcext:value-type="float">
            <text:p>8.45</text:p>
          </table:table-cell>
          <table:table-cell table:style-name="ce255" table:formula="of:=+[.L38]" office:value-type="float" office:value="8.45338983050847" calcext:value-type="float">
            <text:p>8.45</text:p>
          </table:table-cell>
          <table:table-cell table:style-name="ce255" table:formula="of:=+[.M38]" office:value-type="float" office:value="8.45338983050847" calcext:value-type="float">
            <text:p>8.45</text:p>
          </table:table-cell>
          <table:table-cell table:style-name="ce255" table:formula="of:=+[.N38]" office:value-type="float" office:value="8.45338983050847" calcext:value-type="float">
            <text:p>8.45</text:p>
          </table:table-cell>
          <table:table-cell table:style-name="ce255" table:formula="of:=+[.O38]" office:value-type="float" office:value="8.45338983050847" calcext:value-type="float">
            <text:p>8.45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Capital de Trabajo</text:p>
          </table:table-cell>
          <table:table-cell table:style-name="ce248"/>
          <table:table-cell table:style-name="ce248" table:formula="of:=+[.D45]*[.D48]+[.D46]*[.D49]+[.D47]*[.D50]" office:value-type="float" office:value="42332.8538323661" calcext:value-type="float">
            <text:p>42333</text:p>
          </table:table-cell>
          <table:table-cell table:style-name="ce248" table:formula="of:=+[.E45]*[.E48]+[.E46]*[.E49]+[.E47]*[.E50]" office:value-type="float" office:value="42736.3408944135" calcext:value-type="float">
            <text:p>42736</text:p>
          </table:table-cell>
          <table:table-cell table:style-name="ce248" table:formula="of:=+[.F45]*[.F48]+[.F46]*[.F49]+[.F47]*[.F50]" office:value-type="float" office:value="43341.5714874847" calcext:value-type="float">
            <text:p>43342</text:p>
          </table:table-cell>
          <table:table-cell table:style-name="ce248" table:formula="of:=+[.G45]*[.G48]+[.G46]*[.G49]+[.G47]*[.G50]" office:value-type="float" office:value="43358.2153287942" calcext:value-type="float">
            <text:p>43358</text:p>
          </table:table-cell>
          <table:table-cell table:style-name="ce248" table:formula="of:=+[.H45]*[.H48]+[.H46]*[.H49]+[.H47]*[.H50]" office:value-type="float" office:value="42756.3135039849" calcext:value-type="float">
            <text:p>42756</text:p>
          </table:table-cell>
          <table:table-cell table:style-name="ce248" table:formula="of:=+[.I45]*[.I48]+[.I46]*[.I49]+[.I47]*[.I50]" office:value-type="float" office:value="42048.5467612708" calcext:value-type="float">
            <text:p>42049</text:p>
          </table:table-cell>
          <table:table-cell table:style-name="ce248" table:formula="of:=+[.J45]*[.J48]+[.J46]*[.J49]+[.J47]*[.J50]" office:value-type="float" office:value="76662.5417890204" calcext:value-type="float">
            <text:p>76663</text:p>
          </table:table-cell>
          <table:table-cell table:style-name="ce248" table:formula="of:=+[.K45]*[.K48]+[.K46]*[.K49]+[.K47]*[.K50]" office:value-type="float" office:value="45425.58216296" calcext:value-type="float">
            <text:p>45426</text:p>
          </table:table-cell>
          <table:table-cell table:style-name="ce248" table:formula="of:=+[.L45]*[.L48]+[.L46]*[.L49]+[.L47]*[.L50]" office:value-type="float" office:value="46030.8127560312" calcext:value-type="float">
            <text:p>46031</text:p>
          </table:table-cell>
          <table:table-cell table:style-name="ce248" table:formula="of:=+[.M45]*[.M48]+[.M46]*[.M49]+[.M47]*[.M50]" office:value-type="float" office:value="46131.684521543" calcext:value-type="float">
            <text:p>46132</text:p>
          </table:table-cell>
          <table:table-cell table:style-name="ce248" table:formula="of:=+[.N45]*[.N48]+[.N46]*[.N49]+[.N47]*[.N50]" office:value-type="float" office:value="50379.9493619581" calcext:value-type="float">
            <text:p>50380</text:p>
          </table:table-cell>
          <table:table-cell table:style-name="ce248" table:formula="of:=+[.O45]*[.O48]+[.O46]*[.O49]+[.O47]*[.O50]" office:value-type="float" office:value="80697.4124094952" calcext:value-type="float">
            <text:p>80697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Variacion KW</text:p>
          </table:table-cell>
          <table:table-cell table:style-name="ce249" table:formula="of:=[.D51]-[.O39]" office:value-type="float" office:value="-33085.2886064145" calcext:value-type="float">
            <text:p>-33085</text:p>
          </table:table-cell>
          <table:table-cell table:style-name="ce248" table:formula="of:=+[.E51]-[.D51]" office:value-type="float" office:value="403.487062047498" calcext:value-type="float">
            <text:p>403</text:p>
          </table:table-cell>
          <table:table-cell table:style-name="ce248" table:formula="of:=+[.F51]-[.E51]" office:value-type="float" office:value="605.230593071196" calcext:value-type="float">
            <text:p>605</text:p>
          </table:table-cell>
          <table:table-cell table:style-name="ce248" table:formula="of:=+[.G51]-[.F51]" office:value-type="float" office:value="16.6438413094511" calcext:value-type="float">
            <text:p>17</text:p>
          </table:table-cell>
          <table:table-cell table:style-name="ce248" table:formula="of:=+[.H51]-[.G51]" office:value-type="float" office:value="-601.901824809327" calcext:value-type="float">
            <text:p>-602</text:p>
          </table:table-cell>
          <table:table-cell table:style-name="ce248" table:formula="of:=+[.I51]-[.H51]" office:value-type="float" office:value="-707.766742714026" calcext:value-type="float">
            <text:p>-708</text:p>
          </table:table-cell>
          <table:table-cell table:style-name="ce248" table:formula="of:=+[.J51]-[.I51]" office:value-type="float" office:value="34613.9950277496" calcext:value-type="float">
            <text:p>34614</text:p>
          </table:table-cell>
          <table:table-cell table:style-name="ce248" table:formula="of:=+[.K51]-[.J51]" office:value-type="float" office:value="-31236.9596260604" calcext:value-type="float">
            <text:p>-31237</text:p>
          </table:table-cell>
          <table:table-cell table:style-name="ce248" table:formula="of:=+[.L51]-[.K51]" office:value-type="float" office:value="605.230593071203" calcext:value-type="float">
            <text:p>605</text:p>
          </table:table-cell>
          <table:table-cell table:style-name="ce248" table:formula="of:=+[.M51]-[.L51]" office:value-type="float" office:value="100.871765511845" calcext:value-type="float">
            <text:p>101</text:p>
          </table:table-cell>
          <table:table-cell table:style-name="ce248" table:formula="of:=+[.N51]-[.M51]" office:value-type="float" office:value="4248.26484041508" calcext:value-type="float">
            <text:p>4248</text:p>
          </table:table-cell>
          <table:table-cell table:style-name="ce248" table:formula="of:=+[.O51]-[.N51]" office:value-type="float" office:value="30317.4630475371" calcext:value-type="float">
            <text:p>30317</text:p>
          </table:table-cell>
          <table:table-cell table:style-name="ce248"/>
          <table:table-cell table:style-name="ce261" table:formula="of:=SUM([.C52:.O52])" office:value-type="float" office:value="5279.26997071465" calcext:value-type="float">
            <text:p>5279</text:p>
          </table:table-cell>
          <table:table-cell office:value-type="float" office:value="4" calcext:value-type="float">
            <text:p>4</text:p>
          </table:table-cell>
          <table:table-cell table:number-columns-repeated="16367"/>
        </table:table-row>
        <table:table-row table:style-name="ro9">
          <table:table-cell/>
          <table:table-cell table:style-name="ce242" office:value-type="string" calcext:value-type="string">
            <text:p>TOTAL</text:p>
          </table:table-cell>
          <table:table-cell table:style-name="ce241"/>
          <table:table-cell table:style-name="ce248" table:formula="of:=SUM([.D51:.D52])" office:value-type="float" office:value="42736.3408944135" calcext:value-type="float">
            <text:p>42736</text:p>
          </table:table-cell>
          <table:table-cell table:style-name="ce248" table:formula="of:=SUM([.E51:.E52])" office:value-type="float" office:value="43341.5714874847" calcext:value-type="float">
            <text:p>43342</text:p>
          </table:table-cell>
          <table:table-cell table:style-name="ce248" table:formula="of:=SUM([.F51:.F52])" office:value-type="float" office:value="43358.2153287942" calcext:value-type="float">
            <text:p>43358</text:p>
          </table:table-cell>
          <table:table-cell table:style-name="ce248" table:formula="of:=SUM([.G51:.G52])" office:value-type="float" office:value="42756.3135039849" calcext:value-type="float">
            <text:p>42756</text:p>
          </table:table-cell>
          <table:table-cell table:style-name="ce248" table:formula="of:=SUM([.H51:.H52])" office:value-type="float" office:value="42048.5467612708" calcext:value-type="float">
            <text:p>42049</text:p>
          </table:table-cell>
          <table:table-cell table:style-name="ce248" table:formula="of:=SUM([.I51:.I52])" office:value-type="float" office:value="76662.5417890204" calcext:value-type="float">
            <text:p>76663</text:p>
          </table:table-cell>
          <table:table-cell table:style-name="ce248" table:formula="of:=SUM([.J51:.J52])" office:value-type="float" office:value="45425.58216296" calcext:value-type="float">
            <text:p>45426</text:p>
          </table:table-cell>
          <table:table-cell table:style-name="ce248" table:formula="of:=SUM([.K51:.K52])" office:value-type="float" office:value="46030.8127560312" calcext:value-type="float">
            <text:p>46031</text:p>
          </table:table-cell>
          <table:table-cell table:style-name="ce248" table:formula="of:=SUM([.L51:.L52])" office:value-type="float" office:value="46131.684521543" calcext:value-type="float">
            <text:p>46132</text:p>
          </table:table-cell>
          <table:table-cell table:style-name="ce248" table:formula="of:=SUM([.M51:.M52])" office:value-type="float" office:value="50379.9493619581" calcext:value-type="float">
            <text:p>50380</text:p>
          </table:table-cell>
          <table:table-cell table:style-name="ce248" table:formula="of:=SUM([.N51:.N52])" office:value-type="float" office:value="80697.4124094952" calcext:value-type="float">
            <text:p>80697</text:p>
          </table:table-cell>
          <table:table-cell table:style-name="ce248" table:formula="of:=SUM([.O51:.O52])" office:value-type="float" office:value="80697.4124094952" calcext:value-type="float">
            <text:p>80697</text:p>
          </table:table-cell>
          <table:table-cell table:style-name="ce246"/>
          <table:table-cell table:number-columns-repeated="16368"/>
        </table:table-row>
        <table:table-row table:style-name="ro9">
          <table:table-cell table:number-columns-repeated="16384"/>
        </table:table-row>
        <table:table-row table:style-name="ro9">
          <table:table-cell/>
          <table:table-cell table:style-name="ce239" office:value-type="string" calcext:value-type="string" table:number-columns-spanned="1" table:number-rows-spanned="2">
            <text:p>RUBRO</text:p>
          </table:table-cell>
          <table:table-cell table:style-name="ce239" office:value-type="float" office:value="4" calcext:value-type="float" table:number-columns-spanned="1" table:number-rows-spanned="2">
            <text:p>4</text:p>
          </table:table-cell>
          <table:table-cell table:style-name="ce239" office:value-type="string" calcext:value-type="string" table:number-columns-spanned="12" table:number-rows-spanned="1">
            <text:p>AÑO 5</text:p>
          </table:table-cell>
          <table:covered-table-cell table:number-columns-repeated="11" table:style-name="ce240"/>
          <table:table-cell table:style-name="ce259" office:value-type="string" calcext:value-type="string">
            <text:p>Total</text:p>
          </table:table-cell>
          <table:table-cell table:number-columns-repeated="16368"/>
        </table:table-row>
        <table:table-row table:style-name="ro9">
          <table:table-cell/>
          <table:covered-table-cell table:number-columns-repeated="2" table:style-name="ce240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62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DIESEL B5</text:p>
          </table:table-cell>
          <table:table-cell table:style-name="ce241"/>
          <table:table-cell table:style-name="ce254" table:formula="of:=+[$'Presupuesto de ventas'.C17]/2" office:value-type="float" office:value="2800.18407303922" calcext:value-type="float">
            <text:p>2,800</text:p>
          </table:table-cell>
          <table:table-cell table:style-name="ce254" table:formula="of:=+[$'Presupuesto de ventas'.D17]/2" office:value-type="float" office:value="2826.87346301743" calcext:value-type="float">
            <text:p>2,827</text:p>
          </table:table-cell>
          <table:table-cell table:style-name="ce254" table:formula="of:=+[$'Presupuesto de ventas'.E17]/2" office:value-type="float" office:value="2866.90754798475" calcext:value-type="float">
            <text:p>2,867</text:p>
          </table:table-cell>
          <table:table-cell table:style-name="ce254" table:formula="of:=+[$'Presupuesto de ventas'.F17]/2" office:value-type="float" office:value="2868.00848532135" calcext:value-type="float">
            <text:p>2,868</text:p>
          </table:table-cell>
          <table:table-cell table:style-name="ce254" table:formula="of:=+[$'Presupuesto de ventas'.G17]/2" office:value-type="float" office:value="2828.19458782135" calcext:value-type="float">
            <text:p>2,828</text:p>
          </table:table-cell>
          <table:table-cell table:style-name="ce254" table:formula="of:=+[$'Presupuesto de ventas'.H17]/2" office:value-type="float" office:value="2781.37806162582" calcext:value-type="float">
            <text:p>2,781</text:p>
          </table:table-cell>
          <table:table-cell table:style-name="ce254" table:formula="of:=+[$'Presupuesto de ventas'.I17]/2" office:value-type="float" office:value="5070.98409586057" calcext:value-type="float">
            <text:p>5,071</text:p>
          </table:table-cell>
          <table:table-cell table:style-name="ce254" table:formula="of:=+[$'Presupuesto de ventas'.J17]/2" office:value-type="float" office:value="3004.75824722222" calcext:value-type="float">
            <text:p>3,005</text:p>
          </table:table-cell>
          <table:table-cell table:style-name="ce254" table:formula="of:=+[$'Presupuesto de ventas'.K17]/2" office:value-type="float" office:value="3044.79233218954" calcext:value-type="float">
            <text:p>3,045</text:p>
          </table:table-cell>
          <table:table-cell table:style-name="ce254" table:formula="of:=+[$'Presupuesto de ventas'.L17]/2" office:value-type="float" office:value="3051.4646796841" calcext:value-type="float">
            <text:p>3,051</text:p>
          </table:table-cell>
          <table:table-cell table:style-name="ce254" table:formula="of:=+[$'Presupuesto de ventas'.M17]/2" office:value-type="float" office:value="3332.47393059096" calcext:value-type="float">
            <text:p>3,332</text:p>
          </table:table-cell>
          <table:table-cell table:style-name="ce254" table:formula="of:=+[$'Presupuesto de ventas'.N17]/2" office:value-type="float" office:value="5337.8779956427" calcext:value-type="float">
            <text:p>5,338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GASOGHOL 90</text:p>
          </table:table-cell>
          <table:table-cell table:style-name="ce241"/>
          <table:table-cell table:style-name="ce254" table:formula="of:=+[$'Presupuesto de ventas'.C32]/2" office:value-type="float" office:value="2240.14725843137" calcext:value-type="float">
            <text:p>2,240</text:p>
          </table:table-cell>
          <table:table-cell table:style-name="ce254" table:formula="of:=+[$'Presupuesto de ventas'.D32]/2" office:value-type="float" office:value="2261.49877041394" calcext:value-type="float">
            <text:p>2,261</text:p>
          </table:table-cell>
          <table:table-cell table:style-name="ce254" table:formula="of:=+[$'Presupuesto de ventas'.E32]/2" office:value-type="float" office:value="2293.5260383878" calcext:value-type="float">
            <text:p>2,294</text:p>
          </table:table-cell>
          <table:table-cell table:style-name="ce254" table:formula="of:=+[$'Presupuesto de ventas'.F32]/2" office:value-type="float" office:value="2294.40678825708" calcext:value-type="float">
            <text:p>2,294</text:p>
          </table:table-cell>
          <table:table-cell table:style-name="ce254" table:formula="of:=+[$'Presupuesto de ventas'.G32]/2" office:value-type="float" office:value="2262.55567025708" calcext:value-type="float">
            <text:p>2,263</text:p>
          </table:table-cell>
          <table:table-cell table:style-name="ce254" table:formula="of:=+[$'Presupuesto de ventas'.H32]/2" office:value-type="float" office:value="2225.10244930065" calcext:value-type="float">
            <text:p>2,225</text:p>
          </table:table-cell>
          <table:table-cell table:style-name="ce254" table:formula="of:=+[$'Presupuesto de ventas'.I32]/2" office:value-type="float" office:value="4056.78727668845" calcext:value-type="float">
            <text:p>4,057</text:p>
          </table:table-cell>
          <table:table-cell table:style-name="ce254" table:formula="of:=+[$'Presupuesto de ventas'.J32]/2" office:value-type="float" office:value="2403.80659777778" calcext:value-type="float">
            <text:p>2,404</text:p>
          </table:table-cell>
          <table:table-cell table:style-name="ce254" table:formula="of:=+[$'Presupuesto de ventas'.K32]/2" office:value-type="float" office:value="2435.83386575163" calcext:value-type="float">
            <text:p>2,436</text:p>
          </table:table-cell>
          <table:table-cell table:style-name="ce254" table:formula="of:=+[$'Presupuesto de ventas'.L32]/2" office:value-type="float" office:value="2441.17174374728" calcext:value-type="float">
            <text:p>2,441</text:p>
          </table:table-cell>
          <table:table-cell table:style-name="ce254" table:formula="of:=+[$'Presupuesto de ventas'.M32]/2" office:value-type="float" office:value="2665.97914447277" calcext:value-type="float">
            <text:p>2,666</text:p>
          </table:table-cell>
          <table:table-cell table:style-name="ce254" table:formula="of:=+[$'Presupuesto de ventas'.N32]/2" office:value-type="float" office:value="4270.30239651416" calcext:value-type="float">
            <text:p>4,270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GASOHOL 95</text:p>
          </table:table-cell>
          <table:table-cell table:style-name="ce241"/>
          <table:table-cell table:style-name="ce254" table:formula="of:=+[$'Presupuesto de ventas'.C47]/2" office:value-type="float" office:value="516.957059638009" calcext:value-type="float">
            <text:p>517</text:p>
          </table:table-cell>
          <table:table-cell table:style-name="ce254" table:formula="of:=+[$'Presupuesto de ventas'.D47]/2" office:value-type="float" office:value="521.884331633987" calcext:value-type="float">
            <text:p>522</text:p>
          </table:table-cell>
          <table:table-cell table:style-name="ce254" table:formula="of:=+[$'Presupuesto de ventas'.E47]/2" office:value-type="float" office:value="529.275239627954" calcext:value-type="float">
            <text:p>529</text:p>
          </table:table-cell>
          <table:table-cell table:style-name="ce254" table:formula="of:=+[$'Presupuesto de ventas'.F47]/2" office:value-type="float" office:value="529.478489597788" calcext:value-type="float">
            <text:p>529</text:p>
          </table:table-cell>
          <table:table-cell table:style-name="ce254" table:formula="of:=+[$'Presupuesto de ventas'.G47]/2" office:value-type="float" office:value="522.128231597788" calcext:value-type="float">
            <text:p>522</text:p>
          </table:table-cell>
          <table:table-cell table:style-name="ce254" table:formula="of:=+[$'Presupuesto de ventas'.H47]/2" office:value-type="float" office:value="513.485180607843" calcext:value-type="float">
            <text:p>513</text:p>
          </table:table-cell>
          <table:table-cell table:style-name="ce254" table:formula="of:=+[$'Presupuesto de ventas'.I47]/2" office:value-type="float" office:value="936.181679235797" calcext:value-type="float">
            <text:p>936</text:p>
          </table:table-cell>
          <table:table-cell table:style-name="ce254" table:formula="of:=+[$'Presupuesto de ventas'.J47]/2" office:value-type="float" office:value="554.72459948718" calcext:value-type="float">
            <text:p>555</text:p>
          </table:table-cell>
          <table:table-cell table:style-name="ce254" table:formula="of:=+[$'Presupuesto de ventas'.K47]/2" office:value-type="float" office:value="562.115507481146" calcext:value-type="float">
            <text:p>562</text:p>
          </table:table-cell>
          <table:table-cell table:style-name="ce254" table:formula="of:=+[$'Presupuesto de ventas'.L47]/2" office:value-type="float" office:value="563.347325480141" calcext:value-type="float">
            <text:p>563</text:p>
          </table:table-cell>
          <table:table-cell table:style-name="ce254" table:formula="of:=+[$'Presupuesto de ventas'.M47]/2" office:value-type="float" office:value="615.225956416792" calcext:value-type="float">
            <text:p>615</text:p>
          </table:table-cell>
          <table:table-cell table:style-name="ce254" table:formula="of:=+[$'Presupuesto de ventas'.N47]/2" office:value-type="float" office:value="985.454399195576" calcext:value-type="float">
            <text:p>985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valor de compra DB5</text:p>
          </table:table-cell>
          <table:table-cell table:style-name="ce241"/>
          <table:table-cell table:style-name="ce255" table:formula="of:=+[.D48]" office:value-type="float" office:value="8.05889830508475" calcext:value-type="float">
            <text:p>8.06</text:p>
          </table:table-cell>
          <table:table-cell table:style-name="ce255" table:formula="of:=+[.E48]" office:value-type="float" office:value="8.05889830508475" calcext:value-type="float">
            <text:p>8.06</text:p>
          </table:table-cell>
          <table:table-cell table:style-name="ce255" table:formula="of:=+[.F48]" office:value-type="float" office:value="8.05889830508475" calcext:value-type="float">
            <text:p>8.06</text:p>
          </table:table-cell>
          <table:table-cell table:style-name="ce255" table:formula="of:=+[.G48]" office:value-type="float" office:value="8.05889830508475" calcext:value-type="float">
            <text:p>8.06</text:p>
          </table:table-cell>
          <table:table-cell table:style-name="ce255" table:formula="of:=+[.H48]" office:value-type="float" office:value="8.05889830508475" calcext:value-type="float">
            <text:p>8.06</text:p>
          </table:table-cell>
          <table:table-cell table:style-name="ce255" table:formula="of:=+[.I48]" office:value-type="float" office:value="8.05889830508475" calcext:value-type="float">
            <text:p>8.06</text:p>
          </table:table-cell>
          <table:table-cell table:style-name="ce255" table:formula="of:=+[.J48]" office:value-type="float" office:value="8.05889830508475" calcext:value-type="float">
            <text:p>8.06</text:p>
          </table:table-cell>
          <table:table-cell table:style-name="ce255" table:formula="of:=+[.K48]" office:value-type="float" office:value="8.05889830508475" calcext:value-type="float">
            <text:p>8.06</text:p>
          </table:table-cell>
          <table:table-cell table:style-name="ce255" table:formula="of:=+[.L48]" office:value-type="float" office:value="8.05889830508475" calcext:value-type="float">
            <text:p>8.06</text:p>
          </table:table-cell>
          <table:table-cell table:style-name="ce255" table:formula="of:=+[.M48]" office:value-type="float" office:value="8.05889830508475" calcext:value-type="float">
            <text:p>8.06</text:p>
          </table:table-cell>
          <table:table-cell table:style-name="ce255" table:formula="of:=+[.N48]" office:value-type="float" office:value="8.05889830508475" calcext:value-type="float">
            <text:p>8.06</text:p>
          </table:table-cell>
          <table:table-cell table:style-name="ce255" table:formula="of:=+[.O48]" office:value-type="float" office:value="8.05889830508475" calcext:value-type="float">
            <text:p>8.06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valor de compra G90</text:p>
          </table:table-cell>
          <table:table-cell table:style-name="ce241"/>
          <table:table-cell table:style-name="ce255" table:formula="of:=+[.D49]" office:value-type="float" office:value="8.19576271186441" calcext:value-type="float">
            <text:p>8.20</text:p>
          </table:table-cell>
          <table:table-cell table:style-name="ce255" table:formula="of:=+[.E49]" office:value-type="float" office:value="8.19576271186441" calcext:value-type="float">
            <text:p>8.20</text:p>
          </table:table-cell>
          <table:table-cell table:style-name="ce255" table:formula="of:=+[.F49]" office:value-type="float" office:value="8.19576271186441" calcext:value-type="float">
            <text:p>8.20</text:p>
          </table:table-cell>
          <table:table-cell table:style-name="ce255" table:formula="of:=+[.G49]" office:value-type="float" office:value="8.19576271186441" calcext:value-type="float">
            <text:p>8.20</text:p>
          </table:table-cell>
          <table:table-cell table:style-name="ce255" table:formula="of:=+[.H49]" office:value-type="float" office:value="8.19576271186441" calcext:value-type="float">
            <text:p>8.20</text:p>
          </table:table-cell>
          <table:table-cell table:style-name="ce255" table:formula="of:=+[.I49]" office:value-type="float" office:value="8.19576271186441" calcext:value-type="float">
            <text:p>8.20</text:p>
          </table:table-cell>
          <table:table-cell table:style-name="ce255" table:formula="of:=+[.J49]" office:value-type="float" office:value="8.19576271186441" calcext:value-type="float">
            <text:p>8.20</text:p>
          </table:table-cell>
          <table:table-cell table:style-name="ce255" table:formula="of:=+[.K49]" office:value-type="float" office:value="8.19576271186441" calcext:value-type="float">
            <text:p>8.20</text:p>
          </table:table-cell>
          <table:table-cell table:style-name="ce255" table:formula="of:=+[.L49]" office:value-type="float" office:value="8.19576271186441" calcext:value-type="float">
            <text:p>8.20</text:p>
          </table:table-cell>
          <table:table-cell table:style-name="ce255" table:formula="of:=+[.M49]" office:value-type="float" office:value="8.19576271186441" calcext:value-type="float">
            <text:p>8.20</text:p>
          </table:table-cell>
          <table:table-cell table:style-name="ce255" table:formula="of:=+[.N49]" office:value-type="float" office:value="8.19576271186441" calcext:value-type="float">
            <text:p>8.20</text:p>
          </table:table-cell>
          <table:table-cell table:style-name="ce255" table:formula="of:=+[.O49]" office:value-type="float" office:value="8.19576271186441" calcext:value-type="float">
            <text:p>8.20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valor de compra G95</text:p>
          </table:table-cell>
          <table:table-cell table:style-name="ce241"/>
          <table:table-cell table:style-name="ce255" table:formula="of:=+[.D50]" office:value-type="float" office:value="8.45338983050847" calcext:value-type="float">
            <text:p>8.45</text:p>
          </table:table-cell>
          <table:table-cell table:style-name="ce255" table:formula="of:=+[.E50]" office:value-type="float" office:value="8.45338983050847" calcext:value-type="float">
            <text:p>8.45</text:p>
          </table:table-cell>
          <table:table-cell table:style-name="ce255" table:formula="of:=+[.F50]" office:value-type="float" office:value="8.45338983050847" calcext:value-type="float">
            <text:p>8.45</text:p>
          </table:table-cell>
          <table:table-cell table:style-name="ce255" table:formula="of:=+[.G50]" office:value-type="float" office:value="8.45338983050847" calcext:value-type="float">
            <text:p>8.45</text:p>
          </table:table-cell>
          <table:table-cell table:style-name="ce255" table:formula="of:=+[.H50]" office:value-type="float" office:value="8.45338983050847" calcext:value-type="float">
            <text:p>8.45</text:p>
          </table:table-cell>
          <table:table-cell table:style-name="ce255" table:formula="of:=+[.I50]" office:value-type="float" office:value="8.45338983050847" calcext:value-type="float">
            <text:p>8.45</text:p>
          </table:table-cell>
          <table:table-cell table:style-name="ce255" table:formula="of:=+[.J50]" office:value-type="float" office:value="8.45338983050847" calcext:value-type="float">
            <text:p>8.45</text:p>
          </table:table-cell>
          <table:table-cell table:style-name="ce255" table:formula="of:=+[.K50]" office:value-type="float" office:value="8.45338983050847" calcext:value-type="float">
            <text:p>8.45</text:p>
          </table:table-cell>
          <table:table-cell table:style-name="ce255" table:formula="of:=+[.L50]" office:value-type="float" office:value="8.45338983050847" calcext:value-type="float">
            <text:p>8.45</text:p>
          </table:table-cell>
          <table:table-cell table:style-name="ce255" table:formula="of:=+[.M50]" office:value-type="float" office:value="8.45338983050847" calcext:value-type="float">
            <text:p>8.45</text:p>
          </table:table-cell>
          <table:table-cell table:style-name="ce255" table:formula="of:=+[.N50]" office:value-type="float" office:value="8.45338983050847" calcext:value-type="float">
            <text:p>8.45</text:p>
          </table:table-cell>
          <table:table-cell table:style-name="ce255" table:formula="of:=+[.O50]" office:value-type="float" office:value="8.45338983050847" calcext:value-type="float">
            <text:p>8.45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Capital de Trabajo</text:p>
          </table:table-cell>
          <table:table-cell table:style-name="ce248"/>
          <table:table-cell table:style-name="ce248" table:formula="of:=+[.D57]*[.D60]+[.D58]*[.D61]+[.D59]*[.D62]" office:value-type="float" office:value="45296.1536006317" calcext:value-type="float">
            <text:p>45296</text:p>
          </table:table-cell>
          <table:table-cell table:style-name="ce248" table:formula="of:=+[.E57]*[.E60]+[.E58]*[.E61]+[.E59]*[.E62]" office:value-type="float" office:value="45727.8847570225" calcext:value-type="float">
            <text:p>45728</text:p>
          </table:table-cell>
          <table:table-cell table:style-name="ce248" table:formula="of:=+[.F57]*[.F60]+[.F58]*[.F61]+[.F59]*[.F62]" office:value-type="float" office:value="46375.4814916087" calcext:value-type="float">
            <text:p>46375</text:p>
          </table:table-cell>
          <table:table-cell table:style-name="ce248" table:formula="of:=+[.G57]*[.G60]+[.G58]*[.G61]+[.G59]*[.G62]" office:value-type="float" office:value="46393.2904018098" calcext:value-type="float">
            <text:p>46393</text:p>
          </table:table-cell>
          <table:table-cell table:style-name="ce248" table:formula="of:=+[.H57]*[.H60]+[.H58]*[.H61]+[.H59]*[.H62]" office:value-type="float" office:value="45749.2554492638" calcext:value-type="float">
            <text:p>45749</text:p>
          </table:table-cell>
          <table:table-cell table:style-name="ce248" table:formula="of:=+[.I57]*[.I60]+[.I58]*[.I61]+[.I59]*[.I62]" office:value-type="float" office:value="44991.9450345598" calcext:value-type="float">
            <text:p>44992</text:p>
          </table:table-cell>
          <table:table-cell table:style-name="ce248" table:formula="of:=+[.J57]*[.J60]+[.J58]*[.J61]+[.J59]*[.J62]" office:value-type="float" office:value="82028.9197142518" calcext:value-type="float">
            <text:p>82029</text:p>
          </table:table-cell>
          <table:table-cell table:style-name="ce248" table:formula="of:=+[.K57]*[.K60]+[.K58]*[.K61]+[.K59]*[.K62]" office:value-type="float" office:value="48605.3729143672" calcext:value-type="float">
            <text:p>48605</text:p>
          </table:table-cell>
          <table:table-cell table:style-name="ce248" table:formula="of:=+[.L57]*[.L60]+[.L58]*[.L61]+[.L59]*[.L62]" office:value-type="float" office:value="49252.9696489534" calcext:value-type="float">
            <text:p>49253</text:p>
          </table:table-cell>
          <table:table-cell table:style-name="ce248" table:formula="of:=+[.M57]*[.M60]+[.M58]*[.M61]+[.M59]*[.M62]" office:value-type="float" office:value="49360.902438051" calcext:value-type="float">
            <text:p>49361</text:p>
          </table:table-cell>
          <table:table-cell table:style-name="ce248" table:formula="of:=+[.N57]*[.N60]+[.N58]*[.N61]+[.N59]*[.N62]" office:value-type="float" office:value="53906.5458172952" calcext:value-type="float">
            <text:p>53907</text:p>
          </table:table-cell>
          <table:table-cell table:style-name="ce248" table:formula="of:=+[.O57]*[.O60]+[.O58]*[.O61]+[.O59]*[.O62]" office:value-type="float" office:value="86346.2312781598" calcext:value-type="float">
            <text:p>86346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Variacion KW</text:p>
          </table:table-cell>
          <table:table-cell table:style-name="ce249" table:formula="of:=[.D63]-[.O51]" office:value-type="float" office:value="-35401.2588088635" calcext:value-type="float">
            <text:p>-35401</text:p>
          </table:table-cell>
          <table:table-cell table:style-name="ce248" table:formula="of:=+[.E63]-[.D63]" office:value-type="float" office:value="431.731156390822" calcext:value-type="float">
            <text:p>432</text:p>
          </table:table-cell>
          <table:table-cell table:style-name="ce248" table:formula="of:=+[.F63]-[.E63]" office:value-type="float" office:value="647.596734586179" calcext:value-type="float">
            <text:p>648</text:p>
          </table:table-cell>
          <table:table-cell table:style-name="ce248" table:formula="of:=+[.G63]-[.F63]" office:value-type="float" office:value="17.8089102011218" calcext:value-type="float">
            <text:p>18</text:p>
          </table:table-cell>
          <table:table-cell table:style-name="ce248" table:formula="of:=+[.H63]-[.G63]" office:value-type="float" office:value="-644.034952545975" calcext:value-type="float">
            <text:p>-644</text:p>
          </table:table-cell>
          <table:table-cell table:style-name="ce248" table:formula="of:=+[.I63]-[.H63]" office:value-type="float" office:value="-757.310414704014" calcext:value-type="float">
            <text:p>-757</text:p>
          </table:table-cell>
          <table:table-cell table:style-name="ce248" table:formula="of:=+[.J63]-[.I63]" office:value-type="float" office:value="37036.974679692" calcext:value-type="float">
            <text:p>37037</text:p>
          </table:table-cell>
          <table:table-cell table:style-name="ce248" table:formula="of:=+[.K63]-[.J63]" office:value-type="float" office:value="-33423.5467998847" calcext:value-type="float">
            <text:p>-33424</text:p>
          </table:table-cell>
          <table:table-cell table:style-name="ce248" table:formula="of:=+[.L63]-[.K63]" office:value-type="float" office:value="647.596734586186" calcext:value-type="float">
            <text:p>648</text:p>
          </table:table-cell>
          <table:table-cell table:style-name="ce248" table:formula="of:=+[.M63]-[.L63]" office:value-type="float" office:value="107.932789097678" calcext:value-type="float">
            <text:p>108</text:p>
          </table:table-cell>
          <table:table-cell table:style-name="ce248" table:formula="of:=+[.N63]-[.M63]" office:value-type="float" office:value="4545.64337924415" calcext:value-type="float">
            <text:p>4546</text:p>
          </table:table-cell>
          <table:table-cell table:style-name="ce248" table:formula="of:=+[.O63]-[.N63]" office:value-type="float" office:value="32439.6854608646" calcext:value-type="float">
            <text:p>32440</text:p>
          </table:table-cell>
          <table:table-cell table:style-name="ce248"/>
          <table:table-cell table:style-name="ce261" table:formula="of:=SUM([.C64:.O64])" office:value-type="float" office:value="5648.81886866465" calcext:value-type="float">
            <text:p>5649</text:p>
          </table:table-cell>
          <table:table-cell office:value-type="float" office:value="5" calcext:value-type="float">
            <text:p>5</text:p>
          </table:table-cell>
          <table:table-cell table:number-columns-repeated="16367"/>
        </table:table-row>
        <table:table-row table:style-name="ro9">
          <table:table-cell/>
          <table:table-cell table:style-name="ce242" office:value-type="string" calcext:value-type="string">
            <text:p>TOTAL</text:p>
          </table:table-cell>
          <table:table-cell table:style-name="ce241"/>
          <table:table-cell table:style-name="ce248" table:formula="of:=SUM([.D63:.D64])" office:value-type="float" office:value="45727.8847570225" calcext:value-type="float">
            <text:p>45728</text:p>
          </table:table-cell>
          <table:table-cell table:style-name="ce248" table:formula="of:=SUM([.E63:.E64])" office:value-type="float" office:value="46375.4814916087" calcext:value-type="float">
            <text:p>46375</text:p>
          </table:table-cell>
          <table:table-cell table:style-name="ce248" table:formula="of:=SUM([.F63:.F64])" office:value-type="float" office:value="46393.2904018098" calcext:value-type="float">
            <text:p>46393</text:p>
          </table:table-cell>
          <table:table-cell table:style-name="ce248" table:formula="of:=SUM([.G63:.G64])" office:value-type="float" office:value="45749.2554492638" calcext:value-type="float">
            <text:p>45749</text:p>
          </table:table-cell>
          <table:table-cell table:style-name="ce248" table:formula="of:=SUM([.H63:.H64])" office:value-type="float" office:value="44991.9450345598" calcext:value-type="float">
            <text:p>44992</text:p>
          </table:table-cell>
          <table:table-cell table:style-name="ce248" table:formula="of:=SUM([.I63:.I64])" office:value-type="float" office:value="82028.9197142518" calcext:value-type="float">
            <text:p>82029</text:p>
          </table:table-cell>
          <table:table-cell table:style-name="ce248" table:formula="of:=SUM([.J63:.J64])" office:value-type="float" office:value="48605.3729143672" calcext:value-type="float">
            <text:p>48605</text:p>
          </table:table-cell>
          <table:table-cell table:style-name="ce248" table:formula="of:=SUM([.K63:.K64])" office:value-type="float" office:value="49252.9696489534" calcext:value-type="float">
            <text:p>49253</text:p>
          </table:table-cell>
          <table:table-cell table:style-name="ce248" table:formula="of:=SUM([.L63:.L64])" office:value-type="float" office:value="49360.902438051" calcext:value-type="float">
            <text:p>49361</text:p>
          </table:table-cell>
          <table:table-cell table:style-name="ce248" table:formula="of:=SUM([.M63:.M64])" office:value-type="float" office:value="53906.5458172952" calcext:value-type="float">
            <text:p>53907</text:p>
          </table:table-cell>
          <table:table-cell table:style-name="ce248" table:formula="of:=SUM([.N63:.N64])" office:value-type="float" office:value="86346.2312781598" calcext:value-type="float">
            <text:p>86346</text:p>
          </table:table-cell>
          <table:table-cell table:style-name="ce248" table:formula="of:=SUM([.O63:.O64])" office:value-type="float" office:value="86346.2312781598" calcext:value-type="float">
            <text:p>86346</text:p>
          </table:table-cell>
          <table:table-cell table:style-name="ce246"/>
          <table:table-cell table:number-columns-repeated="16368"/>
        </table:table-row>
        <table:table-row table:style-name="ro9">
          <table:table-cell table:number-columns-repeated="16384"/>
        </table:table-row>
        <table:table-row table:style-name="ro9">
          <table:table-cell/>
          <table:table-cell table:style-name="ce239" office:value-type="string" calcext:value-type="string" table:number-columns-spanned="1" table:number-rows-spanned="2">
            <text:p>RUBRO</text:p>
          </table:table-cell>
          <table:table-cell table:style-name="ce239" office:value-type="float" office:value="5" calcext:value-type="float" table:number-columns-spanned="1" table:number-rows-spanned="2">
            <text:p>5</text:p>
          </table:table-cell>
          <table:table-cell table:style-name="ce239" office:value-type="string" calcext:value-type="string" table:number-columns-spanned="12" table:number-rows-spanned="1">
            <text:p>AÑO 6</text:p>
          </table:table-cell>
          <table:covered-table-cell table:number-columns-repeated="11" table:style-name="ce240"/>
          <table:table-cell table:style-name="ce259" office:value-type="string" calcext:value-type="string">
            <text:p>Total</text:p>
          </table:table-cell>
          <table:table-cell table:number-columns-repeated="16368"/>
        </table:table-row>
        <table:table-row table:style-name="ro9">
          <table:table-cell/>
          <table:covered-table-cell table:number-columns-repeated="2" table:style-name="ce240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62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DIESEL B5</text:p>
          </table:table-cell>
          <table:table-cell table:style-name="ce241"/>
          <table:table-cell table:style-name="ce254" table:formula="of:=+[$'Presupuesto de ventas'.C18]/2" office:value-type="float" office:value="2996.19695815196" calcext:value-type="float">
            <text:p>2,996</text:p>
          </table:table-cell>
          <table:table-cell table:style-name="ce254" table:formula="of:=+[$'Presupuesto de ventas'.D18]/2" office:value-type="float" office:value="3024.75460542865" calcext:value-type="float">
            <text:p>3,025</text:p>
          </table:table-cell>
          <table:table-cell table:style-name="ce254" table:formula="of:=+[$'Presupuesto de ventas'.E18]/2" office:value-type="float" office:value="3067.59107634368" calcext:value-type="float">
            <text:p>3,068</text:p>
          </table:table-cell>
          <table:table-cell table:style-name="ce254" table:formula="of:=+[$'Presupuesto de ventas'.F18]/2" office:value-type="float" office:value="3068.76907929385" calcext:value-type="float">
            <text:p>3,069</text:p>
          </table:table-cell>
          <table:table-cell table:style-name="ce254" table:formula="of:=+[$'Presupuesto de ventas'.G18]/2" office:value-type="float" office:value="3026.16820896885" calcext:value-type="float">
            <text:p>3,026</text:p>
          </table:table-cell>
          <table:table-cell table:style-name="ce254" table:formula="of:=+[$'Presupuesto de ventas'.H18]/2" office:value-type="float" office:value="2976.07452593962" calcext:value-type="float">
            <text:p>2,976</text:p>
          </table:table-cell>
          <table:table-cell table:style-name="ce254" table:formula="of:=+[$'Presupuesto de ventas'.I18]/2" office:value-type="float" office:value="5425.95298257081" calcext:value-type="float">
            <text:p>5,426</text:p>
          </table:table-cell>
          <table:table-cell table:style-name="ce254" table:formula="of:=+[$'Presupuesto de ventas'.J18]/2" office:value-type="float" office:value="3215.09132452778" calcext:value-type="float">
            <text:p>3,215</text:p>
          </table:table-cell>
          <table:table-cell table:style-name="ce254" table:formula="of:=+[$'Presupuesto de ventas'.K18]/2" office:value-type="float" office:value="3257.92779544281" calcext:value-type="float">
            <text:p>3,258</text:p>
          </table:table-cell>
          <table:table-cell table:style-name="ce254" table:formula="of:=+[$'Presupuesto de ventas'.L18]/2" office:value-type="float" office:value="3265.06720726198" calcext:value-type="float">
            <text:p>3,265</text:p>
          </table:table-cell>
          <table:table-cell table:style-name="ce254" table:formula="of:=+[$'Presupuesto de ventas'.M18]/2" office:value-type="float" office:value="3565.74710573232" calcext:value-type="float">
            <text:p>3,566</text:p>
          </table:table-cell>
          <table:table-cell table:style-name="ce254" table:formula="of:=+[$'Presupuesto de ventas'.N18]/2" office:value-type="float" office:value="5711.52945533769" calcext:value-type="float">
            <text:p>5,712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GASOGHOL 90</text:p>
          </table:table-cell>
          <table:table-cell table:style-name="ce241"/>
          <table:table-cell table:style-name="ce254" table:formula="of:=+[$'Presupuesto de ventas'.C33]/2" office:value-type="float" office:value="2396.95756652157" calcext:value-type="float">
            <text:p>2,397</text:p>
          </table:table-cell>
          <table:table-cell table:style-name="ce254" table:formula="of:=+[$'Presupuesto de ventas'.D33]/2" office:value-type="float" office:value="2419.80368434292" calcext:value-type="float">
            <text:p>2,420</text:p>
          </table:table-cell>
          <table:table-cell table:style-name="ce254" table:formula="of:=+[$'Presupuesto de ventas'.E33]/2" office:value-type="float" office:value="2454.07286107495" calcext:value-type="float">
            <text:p>2,454</text:p>
          </table:table-cell>
          <table:table-cell table:style-name="ce254" table:formula="of:=+[$'Presupuesto de ventas'.F33]/2" office:value-type="float" office:value="2455.01526343508" calcext:value-type="float">
            <text:p>2,455</text:p>
          </table:table-cell>
          <table:table-cell table:style-name="ce254" table:formula="of:=+[$'Presupuesto de ventas'.G33]/2" office:value-type="float" office:value="2420.93456717508" calcext:value-type="float">
            <text:p>2,421</text:p>
          </table:table-cell>
          <table:table-cell table:style-name="ce254" table:formula="of:=+[$'Presupuesto de ventas'.H33]/2" office:value-type="float" office:value="2380.8596207517" calcext:value-type="float">
            <text:p>2,381</text:p>
          </table:table-cell>
          <table:table-cell table:style-name="ce254" table:formula="of:=+[$'Presupuesto de ventas'.I33]/2" office:value-type="float" office:value="4340.76238605665" calcext:value-type="float">
            <text:p>4,341</text:p>
          </table:table-cell>
          <table:table-cell table:style-name="ce254" table:formula="of:=+[$'Presupuesto de ventas'.J33]/2" office:value-type="float" office:value="2572.07305962222" calcext:value-type="float">
            <text:p>2,572</text:p>
          </table:table-cell>
          <table:table-cell table:style-name="ce254" table:formula="of:=+[$'Presupuesto de ventas'.K33]/2" office:value-type="float" office:value="2606.34223635425" calcext:value-type="float">
            <text:p>2,606</text:p>
          </table:table-cell>
          <table:table-cell table:style-name="ce254" table:formula="of:=+[$'Presupuesto de ventas'.L33]/2" office:value-type="float" office:value="2612.05376580959" calcext:value-type="float">
            <text:p>2,612</text:p>
          </table:table-cell>
          <table:table-cell table:style-name="ce254" table:formula="of:=+[$'Presupuesto de ventas'.M33]/2" office:value-type="float" office:value="2852.59768458586" calcext:value-type="float">
            <text:p>2,853</text:p>
          </table:table-cell>
          <table:table-cell table:style-name="ce254" table:formula="of:=+[$'Presupuesto de ventas'.N33]/2" office:value-type="float" office:value="4569.22356427015" calcext:value-type="float">
            <text:p>4,569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GASOHOL 95</text:p>
          </table:table-cell>
          <table:table-cell table:style-name="ce241"/>
          <table:table-cell table:style-name="ce254" table:formula="of:=+[$'Presupuesto de ventas'.C48]/2" office:value-type="float" office:value="553.14405381267" calcext:value-type="float">
            <text:p>553</text:p>
          </table:table-cell>
          <table:table-cell table:style-name="ce254" table:formula="of:=+[$'Presupuesto de ventas'.D48]/2" office:value-type="float" office:value="558.416234848366" calcext:value-type="float">
            <text:p>558</text:p>
          </table:table-cell>
          <table:table-cell table:style-name="ce254" table:formula="of:=+[$'Presupuesto de ventas'.E48]/2" office:value-type="float" office:value="566.324506401911" calcext:value-type="float">
            <text:p>566</text:p>
          </table:table-cell>
          <table:table-cell table:style-name="ce254" table:formula="of:=+[$'Presupuesto de ventas'.F48]/2" office:value-type="float" office:value="566.541983869633" calcext:value-type="float">
            <text:p>567</text:p>
          </table:table-cell>
          <table:table-cell table:style-name="ce254" table:formula="of:=+[$'Presupuesto de ventas'.G48]/2" office:value-type="float" office:value="558.677207809633" calcext:value-type="float">
            <text:p>559</text:p>
          </table:table-cell>
          <table:table-cell table:style-name="ce254" table:formula="of:=+[$'Presupuesto de ventas'.H48]/2" office:value-type="float" office:value="549.429143250392" calcext:value-type="float">
            <text:p>549</text:p>
          </table:table-cell>
          <table:table-cell table:style-name="ce254" table:formula="of:=+[$'Presupuesto de ventas'.I48]/2" office:value-type="float" office:value="1001.7143967823" calcext:value-type="float">
            <text:p>1,002</text:p>
          </table:table-cell>
          <table:table-cell table:style-name="ce254" table:formula="of:=+[$'Presupuesto de ventas'.J48]/2" office:value-type="float" office:value="593.555321451283" calcext:value-type="float">
            <text:p>594</text:p>
          </table:table-cell>
          <table:table-cell table:style-name="ce254" table:formula="of:=+[$'Presupuesto de ventas'.K48]/2" office:value-type="float" office:value="601.463593004827" calcext:value-type="float">
            <text:p>601</text:p>
          </table:table-cell>
          <table:table-cell table:style-name="ce254" table:formula="of:=+[$'Presupuesto de ventas'.L48]/2" office:value-type="float" office:value="602.781638263751" calcext:value-type="float">
            <text:p>603</text:p>
          </table:table-cell>
          <table:table-cell table:style-name="ce254" table:formula="of:=+[$'Presupuesto de ventas'.M48]/2" office:value-type="float" office:value="658.291773365967" calcext:value-type="float">
            <text:p>658</text:p>
          </table:table-cell>
          <table:table-cell table:style-name="ce254" table:formula="of:=+[$'Presupuesto de ventas'.N48]/2" office:value-type="float" office:value="1054.43620713927" calcext:value-type="float">
            <text:p>1,054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valor de compra DB5</text:p>
          </table:table-cell>
          <table:table-cell table:style-name="ce241"/>
          <table:table-cell table:style-name="ce255" table:formula="of:=+[.D60]" office:value-type="float" office:value="8.05889830508475" calcext:value-type="float">
            <text:p>8.06</text:p>
          </table:table-cell>
          <table:table-cell table:style-name="ce255" table:formula="of:=+[.E60]" office:value-type="float" office:value="8.05889830508475" calcext:value-type="float">
            <text:p>8.06</text:p>
          </table:table-cell>
          <table:table-cell table:style-name="ce255" table:formula="of:=+[.F60]" office:value-type="float" office:value="8.05889830508475" calcext:value-type="float">
            <text:p>8.06</text:p>
          </table:table-cell>
          <table:table-cell table:style-name="ce255" table:formula="of:=+[.G60]" office:value-type="float" office:value="8.05889830508475" calcext:value-type="float">
            <text:p>8.06</text:p>
          </table:table-cell>
          <table:table-cell table:style-name="ce255" table:formula="of:=+[.H60]" office:value-type="float" office:value="8.05889830508475" calcext:value-type="float">
            <text:p>8.06</text:p>
          </table:table-cell>
          <table:table-cell table:style-name="ce255" table:formula="of:=+[.I60]" office:value-type="float" office:value="8.05889830508475" calcext:value-type="float">
            <text:p>8.06</text:p>
          </table:table-cell>
          <table:table-cell table:style-name="ce255" table:formula="of:=+[.J60]" office:value-type="float" office:value="8.05889830508475" calcext:value-type="float">
            <text:p>8.06</text:p>
          </table:table-cell>
          <table:table-cell table:style-name="ce255" table:formula="of:=+[.K60]" office:value-type="float" office:value="8.05889830508475" calcext:value-type="float">
            <text:p>8.06</text:p>
          </table:table-cell>
          <table:table-cell table:style-name="ce255" table:formula="of:=+[.L60]" office:value-type="float" office:value="8.05889830508475" calcext:value-type="float">
            <text:p>8.06</text:p>
          </table:table-cell>
          <table:table-cell table:style-name="ce255" table:formula="of:=+[.M60]" office:value-type="float" office:value="8.05889830508475" calcext:value-type="float">
            <text:p>8.06</text:p>
          </table:table-cell>
          <table:table-cell table:style-name="ce255" table:formula="of:=+[.N60]" office:value-type="float" office:value="8.05889830508475" calcext:value-type="float">
            <text:p>8.06</text:p>
          </table:table-cell>
          <table:table-cell table:style-name="ce255" table:formula="of:=+[.O60]" office:value-type="float" office:value="8.05889830508475" calcext:value-type="float">
            <text:p>8.06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valor de compra G90</text:p>
          </table:table-cell>
          <table:table-cell table:style-name="ce241"/>
          <table:table-cell table:style-name="ce255" table:formula="of:=+[.D61]" office:value-type="float" office:value="8.19576271186441" calcext:value-type="float">
            <text:p>8.20</text:p>
          </table:table-cell>
          <table:table-cell table:style-name="ce255" table:formula="of:=+[.E61]" office:value-type="float" office:value="8.19576271186441" calcext:value-type="float">
            <text:p>8.20</text:p>
          </table:table-cell>
          <table:table-cell table:style-name="ce255" table:formula="of:=+[.F61]" office:value-type="float" office:value="8.19576271186441" calcext:value-type="float">
            <text:p>8.20</text:p>
          </table:table-cell>
          <table:table-cell table:style-name="ce255" table:formula="of:=+[.G61]" office:value-type="float" office:value="8.19576271186441" calcext:value-type="float">
            <text:p>8.20</text:p>
          </table:table-cell>
          <table:table-cell table:style-name="ce255" table:formula="of:=+[.H61]" office:value-type="float" office:value="8.19576271186441" calcext:value-type="float">
            <text:p>8.20</text:p>
          </table:table-cell>
          <table:table-cell table:style-name="ce255" table:formula="of:=+[.I61]" office:value-type="float" office:value="8.19576271186441" calcext:value-type="float">
            <text:p>8.20</text:p>
          </table:table-cell>
          <table:table-cell table:style-name="ce255" table:formula="of:=+[.J61]" office:value-type="float" office:value="8.19576271186441" calcext:value-type="float">
            <text:p>8.20</text:p>
          </table:table-cell>
          <table:table-cell table:style-name="ce255" table:formula="of:=+[.K61]" office:value-type="float" office:value="8.19576271186441" calcext:value-type="float">
            <text:p>8.20</text:p>
          </table:table-cell>
          <table:table-cell table:style-name="ce255" table:formula="of:=+[.L61]" office:value-type="float" office:value="8.19576271186441" calcext:value-type="float">
            <text:p>8.20</text:p>
          </table:table-cell>
          <table:table-cell table:style-name="ce255" table:formula="of:=+[.M61]" office:value-type="float" office:value="8.19576271186441" calcext:value-type="float">
            <text:p>8.20</text:p>
          </table:table-cell>
          <table:table-cell table:style-name="ce255" table:formula="of:=+[.N61]" office:value-type="float" office:value="8.19576271186441" calcext:value-type="float">
            <text:p>8.20</text:p>
          </table:table-cell>
          <table:table-cell table:style-name="ce255" table:formula="of:=+[.O61]" office:value-type="float" office:value="8.19576271186441" calcext:value-type="float">
            <text:p>8.20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valor de compra G95</text:p>
          </table:table-cell>
          <table:table-cell table:style-name="ce241"/>
          <table:table-cell table:style-name="ce255" table:formula="of:=+[.D62]" office:value-type="float" office:value="8.45338983050847" calcext:value-type="float">
            <text:p>8.45</text:p>
          </table:table-cell>
          <table:table-cell table:style-name="ce255" table:formula="of:=+[.E62]" office:value-type="float" office:value="8.45338983050847" calcext:value-type="float">
            <text:p>8.45</text:p>
          </table:table-cell>
          <table:table-cell table:style-name="ce255" table:formula="of:=+[.F62]" office:value-type="float" office:value="8.45338983050847" calcext:value-type="float">
            <text:p>8.45</text:p>
          </table:table-cell>
          <table:table-cell table:style-name="ce255" table:formula="of:=+[.G62]" office:value-type="float" office:value="8.45338983050847" calcext:value-type="float">
            <text:p>8.45</text:p>
          </table:table-cell>
          <table:table-cell table:style-name="ce255" table:formula="of:=+[.H62]" office:value-type="float" office:value="8.45338983050847" calcext:value-type="float">
            <text:p>8.45</text:p>
          </table:table-cell>
          <table:table-cell table:style-name="ce255" table:formula="of:=+[.I62]" office:value-type="float" office:value="8.45338983050847" calcext:value-type="float">
            <text:p>8.45</text:p>
          </table:table-cell>
          <table:table-cell table:style-name="ce255" table:formula="of:=+[.J62]" office:value-type="float" office:value="8.45338983050847" calcext:value-type="float">
            <text:p>8.45</text:p>
          </table:table-cell>
          <table:table-cell table:style-name="ce255" table:formula="of:=+[.K62]" office:value-type="float" office:value="8.45338983050847" calcext:value-type="float">
            <text:p>8.45</text:p>
          </table:table-cell>
          <table:table-cell table:style-name="ce255" table:formula="of:=+[.L62]" office:value-type="float" office:value="8.45338983050847" calcext:value-type="float">
            <text:p>8.45</text:p>
          </table:table-cell>
          <table:table-cell table:style-name="ce255" table:formula="of:=+[.M62]" office:value-type="float" office:value="8.45338983050847" calcext:value-type="float">
            <text:p>8.45</text:p>
          </table:table-cell>
          <table:table-cell table:style-name="ce255" table:formula="of:=+[.N62]" office:value-type="float" office:value="8.45338983050847" calcext:value-type="float">
            <text:p>8.45</text:p>
          </table:table-cell>
          <table:table-cell table:style-name="ce255" table:formula="of:=+[.O62]" office:value-type="float" office:value="8.45338983050847" calcext:value-type="float">
            <text:p>8.45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Capital de Trabajo</text:p>
          </table:table-cell>
          <table:table-cell table:style-name="ce248"/>
          <table:table-cell table:style-name="ce248" table:formula="of:=+[.D69]*[.D72]+[.D70]*[.D73]+[.D71]*[.D74]" office:value-type="float" office:value="48466.8843526759" calcext:value-type="float">
            <text:p>48467</text:p>
          </table:table-cell>
          <table:table-cell table:style-name="ce248" table:formula="of:=+[.E69]*[.E72]+[.E70]*[.E73]+[.E71]*[.E74]" office:value-type="float" office:value="48928.8366900141" calcext:value-type="float">
            <text:p>48929</text:p>
          </table:table-cell>
          <table:table-cell table:style-name="ce248" table:formula="of:=+[.F69]*[.F72]+[.F70]*[.F73]+[.F71]*[.F74]" office:value-type="float" office:value="49621.7651960213" calcext:value-type="float">
            <text:p>49622</text:p>
          </table:table-cell>
          <table:table-cell table:style-name="ce248" table:formula="of:=+[.G69]*[.G72]+[.G70]*[.G73]+[.G71]*[.G74]" office:value-type="float" office:value="49640.8207299365" calcext:value-type="float">
            <text:p>49641</text:p>
          </table:table-cell>
          <table:table-cell table:style-name="ce248" table:formula="of:=+[.H69]*[.H72]+[.H70]*[.H73]+[.H71]*[.H74]" office:value-type="float" office:value="48951.7033307123" calcext:value-type="float">
            <text:p>48952</text:p>
          </table:table-cell>
          <table:table-cell table:style-name="ce248" table:formula="of:=+[.I69]*[.I72]+[.I70]*[.I73]+[.I71]*[.I74]" office:value-type="float" office:value="48141.381186979" calcext:value-type="float">
            <text:p>48141</text:p>
          </table:table-cell>
          <table:table-cell table:style-name="ce248" table:formula="of:=+[.J69]*[.J72]+[.J70]*[.J73]+[.J71]*[.J74]" office:value-type="float" office:value="87770.9440942495" calcext:value-type="float">
            <text:p>87771</text:p>
          </table:table-cell>
          <table:table-cell table:style-name="ce248" table:formula="of:=+[.K69]*[.K72]+[.K70]*[.K73]+[.K71]*[.K74]" office:value-type="float" office:value="52007.7490183729" calcext:value-type="float">
            <text:p>52008</text:p>
          </table:table-cell>
          <table:table-cell table:style-name="ce248" table:formula="of:=+[.L69]*[.L72]+[.L70]*[.L73]+[.L71]*[.L74]" office:value-type="float" office:value="52700.6775243801" calcext:value-type="float">
            <text:p>52701</text:p>
          </table:table-cell>
          <table:table-cell table:style-name="ce248" table:formula="of:=+[.M69]*[.M72]+[.M70]*[.M73]+[.M71]*[.M74]" office:value-type="float" office:value="52816.1656087146" calcext:value-type="float">
            <text:p>52816</text:p>
          </table:table-cell>
          <table:table-cell table:style-name="ce248" table:formula="of:=+[.N69]*[.N72]+[.N70]*[.N73]+[.N71]*[.N74]" office:value-type="float" office:value="57680.0040245058" calcext:value-type="float">
            <text:p>57680</text:p>
          </table:table-cell>
          <table:table-cell table:style-name="ce248" table:formula="of:=+[.O69]*[.O72]+[.O70]*[.O73]+[.O71]*[.O74]" office:value-type="float" office:value="92390.467467631" calcext:value-type="float">
            <text:p>92390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Variacion KW</text:p>
          </table:table-cell>
          <table:table-cell table:style-name="ce249" table:formula="of:=[.D75]-[.O63]" office:value-type="float" office:value="-37879.3469254839" calcext:value-type="float">
            <text:p>-37879</text:p>
          </table:table-cell>
          <table:table-cell table:style-name="ce248" table:formula="of:=+[.E75]-[.D75]" office:value-type="float" office:value="461.952337338174" calcext:value-type="float">
            <text:p>462</text:p>
          </table:table-cell>
          <table:table-cell table:style-name="ce248" table:formula="of:=+[.F75]-[.E75]" office:value-type="float" office:value="692.928506007222" calcext:value-type="float">
            <text:p>693</text:p>
          </table:table-cell>
          <table:table-cell table:style-name="ce248" table:formula="of:=+[.G75]-[.F75]" office:value-type="float" office:value="19.0555339151906" calcext:value-type="float">
            <text:p>19</text:p>
          </table:table-cell>
          <table:table-cell table:style-name="ce248" table:formula="of:=+[.H75]-[.G75]" office:value-type="float" office:value="-689.117399224189" calcext:value-type="float">
            <text:p>-689</text:p>
          </table:table-cell>
          <table:table-cell table:style-name="ce248" table:formula="of:=+[.I75]-[.H75]" office:value-type="float" office:value="-810.322143733298" calcext:value-type="float">
            <text:p>-810</text:p>
          </table:table-cell>
          <table:table-cell table:style-name="ce248" table:formula="of:=+[.J75]-[.I75]" office:value-type="float" office:value="39629.5629072705" calcext:value-type="float">
            <text:p>39630</text:p>
          </table:table-cell>
          <table:table-cell table:style-name="ce248" table:formula="of:=+[.K75]-[.J75]" office:value-type="float" office:value="-35763.1950758766" calcext:value-type="float">
            <text:p>-35763</text:p>
          </table:table-cell>
          <table:table-cell table:style-name="ce248" table:formula="of:=+[.L75]-[.K75]" office:value-type="float" office:value="692.928506007229" calcext:value-type="float">
            <text:p>693</text:p>
          </table:table-cell>
          <table:table-cell table:style-name="ce248" table:formula="of:=+[.M75]-[.L75]" office:value-type="float" office:value="115.488084334516" calcext:value-type="float">
            <text:p>115</text:p>
          </table:table-cell>
          <table:table-cell table:style-name="ce248" table:formula="of:=+[.N75]-[.M75]" office:value-type="float" office:value="4863.83841579123" calcext:value-type="float">
            <text:p>4864</text:p>
          </table:table-cell>
          <table:table-cell table:style-name="ce248" table:formula="of:=+[.O75]-[.N75]" office:value-type="float" office:value="34710.4634431252" calcext:value-type="float">
            <text:p>34710</text:p>
          </table:table-cell>
          <table:table-cell table:style-name="ce248"/>
          <table:table-cell table:style-name="ce261" table:formula="of:=SUM([.C76:.O76])" office:value-type="float" office:value="6044.23618947119" calcext:value-type="float">
            <text:p>6044</text:p>
          </table:table-cell>
          <table:table-cell office:value-type="float" office:value="6" calcext:value-type="float">
            <text:p>6</text:p>
          </table:table-cell>
          <table:table-cell table:number-columns-repeated="16367"/>
        </table:table-row>
        <table:table-row table:style-name="ro9">
          <table:table-cell/>
          <table:table-cell table:style-name="ce242" office:value-type="string" calcext:value-type="string">
            <text:p>TOTAL</text:p>
          </table:table-cell>
          <table:table-cell table:style-name="ce241"/>
          <table:table-cell table:style-name="ce248" table:formula="of:=SUM([.D75:.D76])" office:value-type="float" office:value="48928.8366900141" calcext:value-type="float">
            <text:p>48929</text:p>
          </table:table-cell>
          <table:table-cell table:style-name="ce248" table:formula="of:=SUM([.E75:.E76])" office:value-type="float" office:value="49621.7651960213" calcext:value-type="float">
            <text:p>49622</text:p>
          </table:table-cell>
          <table:table-cell table:style-name="ce248" table:formula="of:=SUM([.F75:.F76])" office:value-type="float" office:value="49640.8207299365" calcext:value-type="float">
            <text:p>49641</text:p>
          </table:table-cell>
          <table:table-cell table:style-name="ce248" table:formula="of:=SUM([.G75:.G76])" office:value-type="float" office:value="48951.7033307123" calcext:value-type="float">
            <text:p>48952</text:p>
          </table:table-cell>
          <table:table-cell table:style-name="ce248" table:formula="of:=SUM([.H75:.H76])" office:value-type="float" office:value="48141.381186979" calcext:value-type="float">
            <text:p>48141</text:p>
          </table:table-cell>
          <table:table-cell table:style-name="ce248" table:formula="of:=SUM([.I75:.I76])" office:value-type="float" office:value="87770.9440942495" calcext:value-type="float">
            <text:p>87771</text:p>
          </table:table-cell>
          <table:table-cell table:style-name="ce248" table:formula="of:=SUM([.J75:.J76])" office:value-type="float" office:value="52007.7490183729" calcext:value-type="float">
            <text:p>52008</text:p>
          </table:table-cell>
          <table:table-cell table:style-name="ce248" table:formula="of:=SUM([.K75:.K76])" office:value-type="float" office:value="52700.6775243801" calcext:value-type="float">
            <text:p>52701</text:p>
          </table:table-cell>
          <table:table-cell table:style-name="ce248" table:formula="of:=SUM([.L75:.L76])" office:value-type="float" office:value="52816.1656087146" calcext:value-type="float">
            <text:p>52816</text:p>
          </table:table-cell>
          <table:table-cell table:style-name="ce248" table:formula="of:=SUM([.M75:.M76])" office:value-type="float" office:value="57680.0040245058" calcext:value-type="float">
            <text:p>57680</text:p>
          </table:table-cell>
          <table:table-cell table:style-name="ce248" table:formula="of:=SUM([.N75:.N76])" office:value-type="float" office:value="92390.467467631" calcext:value-type="float">
            <text:p>92390</text:p>
          </table:table-cell>
          <table:table-cell table:style-name="ce248" table:formula="of:=SUM([.O75:.O76])" office:value-type="float" office:value="92390.467467631" calcext:value-type="float">
            <text:p>92390</text:p>
          </table:table-cell>
          <table:table-cell table:style-name="ce246"/>
          <table:table-cell table:number-columns-repeated="16368"/>
        </table:table-row>
        <table:table-row table:style-name="ro9">
          <table:table-cell table:number-columns-repeated="16384"/>
        </table:table-row>
        <table:table-row table:style-name="ro9">
          <table:table-cell/>
          <table:table-cell table:style-name="ce239" office:value-type="string" calcext:value-type="string" table:number-columns-spanned="1" table:number-rows-spanned="2">
            <text:p>RUBRO</text:p>
          </table:table-cell>
          <table:table-cell table:style-name="ce239" office:value-type="float" office:value="6" calcext:value-type="float" table:number-columns-spanned="1" table:number-rows-spanned="2">
            <text:p>6</text:p>
          </table:table-cell>
          <table:table-cell table:style-name="ce239" office:value-type="string" calcext:value-type="string" table:number-columns-spanned="12" table:number-rows-spanned="1">
            <text:p>AÑO 7</text:p>
          </table:table-cell>
          <table:covered-table-cell table:number-columns-repeated="11" table:style-name="ce240"/>
          <table:table-cell table:style-name="ce259" office:value-type="string" calcext:value-type="string">
            <text:p>Total</text:p>
          </table:table-cell>
          <table:table-cell table:number-columns-repeated="16368"/>
        </table:table-row>
        <table:table-row table:style-name="ro9">
          <table:table-cell/>
          <table:covered-table-cell table:number-columns-repeated="2" table:style-name="ce240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62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DIESEL B5</text:p>
          </table:table-cell>
          <table:table-cell table:style-name="ce241"/>
          <table:table-cell table:style-name="ce254" table:formula="of:=+[$'Presupuesto de ventas'.C19]/2" office:value-type="float" office:value="3205.9307452226" calcext:value-type="float">
            <text:p>3,206</text:p>
          </table:table-cell>
          <table:table-cell table:style-name="ce254" table:formula="of:=+[$'Presupuesto de ventas'.D19]/2" office:value-type="float" office:value="3236.48742780866" calcext:value-type="float">
            <text:p>3,236</text:p>
          </table:table-cell>
          <table:table-cell table:style-name="ce254" table:formula="of:=+[$'Presupuesto de ventas'.E19]/2" office:value-type="float" office:value="3282.32245168774" calcext:value-type="float">
            <text:p>3,282</text:p>
          </table:table-cell>
          <table:table-cell table:style-name="ce254" table:formula="of:=+[$'Presupuesto de ventas'.F19]/2" office:value-type="float" office:value="3283.58291484442" calcext:value-type="float">
            <text:p>3,284</text:p>
          </table:table-cell>
          <table:table-cell table:style-name="ce254" table:formula="of:=+[$'Presupuesto de ventas'.G19]/2" office:value-type="float" office:value="3237.99998359666" calcext:value-type="float">
            <text:p>3,238</text:p>
          </table:table-cell>
          <table:table-cell table:style-name="ce254" table:formula="of:=+[$'Presupuesto de ventas'.H19]/2" office:value-type="float" office:value="3184.3997427554" calcext:value-type="float">
            <text:p>3,184</text:p>
          </table:table-cell>
          <table:table-cell table:style-name="ce254" table:formula="of:=+[$'Presupuesto de ventas'.I19]/2" office:value-type="float" office:value="5805.76969135076" calcext:value-type="float">
            <text:p>5,806</text:p>
          </table:table-cell>
          <table:table-cell table:style-name="ce254" table:formula="of:=+[$'Presupuesto de ventas'.J19]/2" office:value-type="float" office:value="3440.14771724472" calcext:value-type="float">
            <text:p>3,440</text:p>
          </table:table-cell>
          <table:table-cell table:style-name="ce254" table:formula="of:=+[$'Presupuesto de ventas'.K19]/2" office:value-type="float" office:value="3485.98274112381" calcext:value-type="float">
            <text:p>3,486</text:p>
          </table:table-cell>
          <table:table-cell table:style-name="ce254" table:formula="of:=+[$'Presupuesto de ventas'.L19]/2" office:value-type="float" office:value="3493.62191177032" calcext:value-type="float">
            <text:p>3,494</text:p>
          </table:table-cell>
          <table:table-cell table:style-name="ce254" table:formula="of:=+[$'Presupuesto de ventas'.M19]/2" office:value-type="float" office:value="3815.34940313359" calcext:value-type="float">
            <text:p>3,815</text:p>
          </table:table-cell>
          <table:table-cell table:style-name="ce254" table:formula="of:=+[$'Presupuesto de ventas'.N19]/2" office:value-type="float" office:value="6111.33651721133" calcext:value-type="float">
            <text:p>6,111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GASOGHOL 90</text:p>
          </table:table-cell>
          <table:table-cell table:style-name="ce241"/>
          <table:table-cell table:style-name="ce254" table:formula="of:=+[$'Presupuesto de ventas'.C34]/2" office:value-type="float" office:value="2564.74459617808" calcext:value-type="float">
            <text:p>2,565</text:p>
          </table:table-cell>
          <table:table-cell table:style-name="ce254" table:formula="of:=+[$'Presupuesto de ventas'.D34]/2" office:value-type="float" office:value="2589.18994224693" calcext:value-type="float">
            <text:p>2,589</text:p>
          </table:table-cell>
          <table:table-cell table:style-name="ce254" table:formula="of:=+[$'Presupuesto de ventas'.E34]/2" office:value-type="float" office:value="2625.85796135019" calcext:value-type="float">
            <text:p>2,626</text:p>
          </table:table-cell>
          <table:table-cell table:style-name="ce254" table:formula="of:=+[$'Presupuesto de ventas'.F34]/2" office:value-type="float" office:value="2626.86633187553" calcext:value-type="float">
            <text:p>2,627</text:p>
          </table:table-cell>
          <table:table-cell table:style-name="ce254" table:formula="of:=+[$'Presupuesto de ventas'.G34]/2" office:value-type="float" office:value="2590.39998687733" calcext:value-type="float">
            <text:p>2,590</text:p>
          </table:table-cell>
          <table:table-cell table:style-name="ce254" table:formula="of:=+[$'Presupuesto de ventas'.H34]/2" office:value-type="float" office:value="2547.51979420432" calcext:value-type="float">
            <text:p>2,548</text:p>
          </table:table-cell>
          <table:table-cell table:style-name="ce254" table:formula="of:=+[$'Presupuesto de ventas'.I34]/2" office:value-type="float" office:value="4644.61575308061" calcext:value-type="float">
            <text:p>4,645</text:p>
          </table:table-cell>
          <table:table-cell table:style-name="ce254" table:formula="of:=+[$'Presupuesto de ventas'.J34]/2" office:value-type="float" office:value="2752.11817379578" calcext:value-type="float">
            <text:p>2,752</text:p>
          </table:table-cell>
          <table:table-cell table:style-name="ce254" table:formula="of:=+[$'Presupuesto de ventas'.K34]/2" office:value-type="float" office:value="2788.78619289905" calcext:value-type="float">
            <text:p>2,789</text:p>
          </table:table-cell>
          <table:table-cell table:style-name="ce254" table:formula="of:=+[$'Presupuesto de ventas'.L34]/2" office:value-type="float" office:value="2794.89752941626" calcext:value-type="float">
            <text:p>2,795</text:p>
          </table:table-cell>
          <table:table-cell table:style-name="ce254" table:formula="of:=+[$'Presupuesto de ventas'.M34]/2" office:value-type="float" office:value="3052.27952250687" calcext:value-type="float">
            <text:p>3,052</text:p>
          </table:table-cell>
          <table:table-cell table:style-name="ce254" table:formula="of:=+[$'Presupuesto de ventas'.N34]/2" office:value-type="float" office:value="4889.06921376906" calcext:value-type="float">
            <text:p>4,889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GASOHOL 95</text:p>
          </table:table-cell>
          <table:table-cell table:style-name="ce241"/>
          <table:table-cell table:style-name="ce254" table:formula="of:=+[$'Presupuesto de ventas'.C49]/2" office:value-type="float" office:value="591.864137579557" calcext:value-type="float">
            <text:p>592</text:p>
          </table:table-cell>
          <table:table-cell table:style-name="ce254" table:formula="of:=+[$'Presupuesto de ventas'.D49]/2" office:value-type="float" office:value="597.505371287752" calcext:value-type="float">
            <text:p>598</text:p>
          </table:table-cell>
          <table:table-cell table:style-name="ce254" table:formula="of:=+[$'Presupuesto de ventas'.E49]/2" office:value-type="float" office:value="605.967221850044" calcext:value-type="float">
            <text:p>606</text:p>
          </table:table-cell>
          <table:table-cell table:style-name="ce254" table:formula="of:=+[$'Presupuesto de ventas'.F49]/2" office:value-type="float" office:value="606.199922740507" calcext:value-type="float">
            <text:p>606</text:p>
          </table:table-cell>
          <table:table-cell table:style-name="ce254" table:formula="of:=+[$'Presupuesto de ventas'.G49]/2" office:value-type="float" office:value="597.784612356307" calcext:value-type="float">
            <text:p>598</text:p>
          </table:table-cell>
          <table:table-cell table:style-name="ce254" table:formula="of:=+[$'Presupuesto de ventas'.H49]/2" office:value-type="float" office:value="587.88918327792" calcext:value-type="float">
            <text:p>588</text:p>
          </table:table-cell>
          <table:table-cell table:style-name="ce254" table:formula="of:=+[$'Presupuesto de ventas'.I49]/2" office:value-type="float" office:value="1071.83440455706" calcext:value-type="float">
            <text:p>1,072</text:p>
          </table:table-cell>
          <table:table-cell table:style-name="ce254" table:formula="of:=+[$'Presupuesto de ventas'.J49]/2" office:value-type="float" office:value="635.104193952872" calcext:value-type="float">
            <text:p>635</text:p>
          </table:table-cell>
          <table:table-cell table:style-name="ce254" table:formula="of:=+[$'Presupuesto de ventas'.K49]/2" office:value-type="float" office:value="643.566044515165" calcext:value-type="float">
            <text:p>644</text:p>
          </table:table-cell>
          <table:table-cell table:style-name="ce254" table:formula="of:=+[$'Presupuesto de ventas'.L49]/2" office:value-type="float" office:value="644.976352942213" calcext:value-type="float">
            <text:p>645</text:p>
          </table:table-cell>
          <table:table-cell table:style-name="ce254" table:formula="of:=+[$'Presupuesto de ventas'.M49]/2" office:value-type="float" office:value="704.372197501585" calcext:value-type="float">
            <text:p>704</text:p>
          </table:table-cell>
          <table:table-cell table:style-name="ce254" table:formula="of:=+[$'Presupuesto de ventas'.N49]/2" office:value-type="float" office:value="1128.24674163901" calcext:value-type="float">
            <text:p>1,128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valor de compra DB5</text:p>
          </table:table-cell>
          <table:table-cell table:style-name="ce241"/>
          <table:table-cell table:style-name="ce255" table:formula="of:=+[.D72]" office:value-type="float" office:value="8.05889830508475" calcext:value-type="float">
            <text:p>8.06</text:p>
          </table:table-cell>
          <table:table-cell table:style-name="ce255" table:formula="of:=+[.E72]" office:value-type="float" office:value="8.05889830508475" calcext:value-type="float">
            <text:p>8.06</text:p>
          </table:table-cell>
          <table:table-cell table:style-name="ce255" table:formula="of:=+[.F72]" office:value-type="float" office:value="8.05889830508475" calcext:value-type="float">
            <text:p>8.06</text:p>
          </table:table-cell>
          <table:table-cell table:style-name="ce255" table:formula="of:=+[.G72]" office:value-type="float" office:value="8.05889830508475" calcext:value-type="float">
            <text:p>8.06</text:p>
          </table:table-cell>
          <table:table-cell table:style-name="ce255" table:formula="of:=+[.H72]" office:value-type="float" office:value="8.05889830508475" calcext:value-type="float">
            <text:p>8.06</text:p>
          </table:table-cell>
          <table:table-cell table:style-name="ce255" table:formula="of:=+[.I72]" office:value-type="float" office:value="8.05889830508475" calcext:value-type="float">
            <text:p>8.06</text:p>
          </table:table-cell>
          <table:table-cell table:style-name="ce255" table:formula="of:=+[.J72]" office:value-type="float" office:value="8.05889830508475" calcext:value-type="float">
            <text:p>8.06</text:p>
          </table:table-cell>
          <table:table-cell table:style-name="ce255" table:formula="of:=+[.K72]" office:value-type="float" office:value="8.05889830508475" calcext:value-type="float">
            <text:p>8.06</text:p>
          </table:table-cell>
          <table:table-cell table:style-name="ce255" table:formula="of:=+[.L72]" office:value-type="float" office:value="8.05889830508475" calcext:value-type="float">
            <text:p>8.06</text:p>
          </table:table-cell>
          <table:table-cell table:style-name="ce255" table:formula="of:=+[.M72]" office:value-type="float" office:value="8.05889830508475" calcext:value-type="float">
            <text:p>8.06</text:p>
          </table:table-cell>
          <table:table-cell table:style-name="ce255" table:formula="of:=+[.N72]" office:value-type="float" office:value="8.05889830508475" calcext:value-type="float">
            <text:p>8.06</text:p>
          </table:table-cell>
          <table:table-cell table:style-name="ce255" table:formula="of:=+[.O72]" office:value-type="float" office:value="8.05889830508475" calcext:value-type="float">
            <text:p>8.06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valor de compra G90</text:p>
          </table:table-cell>
          <table:table-cell table:style-name="ce241"/>
          <table:table-cell table:style-name="ce255" table:formula="of:=+[.D73]" office:value-type="float" office:value="8.19576271186441" calcext:value-type="float">
            <text:p>8.20</text:p>
          </table:table-cell>
          <table:table-cell table:style-name="ce255" table:formula="of:=+[.E73]" office:value-type="float" office:value="8.19576271186441" calcext:value-type="float">
            <text:p>8.20</text:p>
          </table:table-cell>
          <table:table-cell table:style-name="ce255" table:formula="of:=+[.F73]" office:value-type="float" office:value="8.19576271186441" calcext:value-type="float">
            <text:p>8.20</text:p>
          </table:table-cell>
          <table:table-cell table:style-name="ce255" table:formula="of:=+[.G73]" office:value-type="float" office:value="8.19576271186441" calcext:value-type="float">
            <text:p>8.20</text:p>
          </table:table-cell>
          <table:table-cell table:style-name="ce255" table:formula="of:=+[.H73]" office:value-type="float" office:value="8.19576271186441" calcext:value-type="float">
            <text:p>8.20</text:p>
          </table:table-cell>
          <table:table-cell table:style-name="ce255" table:formula="of:=+[.I73]" office:value-type="float" office:value="8.19576271186441" calcext:value-type="float">
            <text:p>8.20</text:p>
          </table:table-cell>
          <table:table-cell table:style-name="ce255" table:formula="of:=+[.J73]" office:value-type="float" office:value="8.19576271186441" calcext:value-type="float">
            <text:p>8.20</text:p>
          </table:table-cell>
          <table:table-cell table:style-name="ce255" table:formula="of:=+[.K73]" office:value-type="float" office:value="8.19576271186441" calcext:value-type="float">
            <text:p>8.20</text:p>
          </table:table-cell>
          <table:table-cell table:style-name="ce255" table:formula="of:=+[.L73]" office:value-type="float" office:value="8.19576271186441" calcext:value-type="float">
            <text:p>8.20</text:p>
          </table:table-cell>
          <table:table-cell table:style-name="ce255" table:formula="of:=+[.M73]" office:value-type="float" office:value="8.19576271186441" calcext:value-type="float">
            <text:p>8.20</text:p>
          </table:table-cell>
          <table:table-cell table:style-name="ce255" table:formula="of:=+[.N73]" office:value-type="float" office:value="8.19576271186441" calcext:value-type="float">
            <text:p>8.20</text:p>
          </table:table-cell>
          <table:table-cell table:style-name="ce255" table:formula="of:=+[.O73]" office:value-type="float" office:value="8.19576271186441" calcext:value-type="float">
            <text:p>8.20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valor de compra G95</text:p>
          </table:table-cell>
          <table:table-cell table:style-name="ce241"/>
          <table:table-cell table:style-name="ce255" table:formula="of:=+[.D74]" office:value-type="float" office:value="8.45338983050847" calcext:value-type="float">
            <text:p>8.45</text:p>
          </table:table-cell>
          <table:table-cell table:style-name="ce255" table:formula="of:=+[.E74]" office:value-type="float" office:value="8.45338983050847" calcext:value-type="float">
            <text:p>8.45</text:p>
          </table:table-cell>
          <table:table-cell table:style-name="ce255" table:formula="of:=+[.F74]" office:value-type="float" office:value="8.45338983050847" calcext:value-type="float">
            <text:p>8.45</text:p>
          </table:table-cell>
          <table:table-cell table:style-name="ce255" table:formula="of:=+[.G74]" office:value-type="float" office:value="8.45338983050847" calcext:value-type="float">
            <text:p>8.45</text:p>
          </table:table-cell>
          <table:table-cell table:style-name="ce255" table:formula="of:=+[.H74]" office:value-type="float" office:value="8.45338983050847" calcext:value-type="float">
            <text:p>8.45</text:p>
          </table:table-cell>
          <table:table-cell table:style-name="ce255" table:formula="of:=+[.I74]" office:value-type="float" office:value="8.45338983050847" calcext:value-type="float">
            <text:p>8.45</text:p>
          </table:table-cell>
          <table:table-cell table:style-name="ce255" table:formula="of:=+[.J74]" office:value-type="float" office:value="8.45338983050847" calcext:value-type="float">
            <text:p>8.45</text:p>
          </table:table-cell>
          <table:table-cell table:style-name="ce255" table:formula="of:=+[.K74]" office:value-type="float" office:value="8.45338983050847" calcext:value-type="float">
            <text:p>8.45</text:p>
          </table:table-cell>
          <table:table-cell table:style-name="ce255" table:formula="of:=+[.L74]" office:value-type="float" office:value="8.45338983050847" calcext:value-type="float">
            <text:p>8.45</text:p>
          </table:table-cell>
          <table:table-cell table:style-name="ce255" table:formula="of:=+[.M74]" office:value-type="float" office:value="8.45338983050847" calcext:value-type="float">
            <text:p>8.45</text:p>
          </table:table-cell>
          <table:table-cell table:style-name="ce255" table:formula="of:=+[.N74]" office:value-type="float" office:value="8.45338983050847" calcext:value-type="float">
            <text:p>8.45</text:p>
          </table:table-cell>
          <table:table-cell table:style-name="ce255" table:formula="of:=+[.O74]" office:value-type="float" office:value="8.45338983050847" calcext:value-type="float">
            <text:p>8.45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Capital de Trabajo</text:p>
          </table:table-cell>
          <table:table-cell table:style-name="ce248"/>
          <table:table-cell table:style-name="ce248" table:formula="of:=+[.D81]*[.D84]+[.D82]*[.D85]+[.D83]*[.D86]" office:value-type="float" office:value="51859.5662573632" calcext:value-type="float">
            <text:p>51860</text:p>
          </table:table-cell>
          <table:table-cell table:style-name="ce248" table:formula="of:=+[.E81]*[.E84]+[.E82]*[.E85]+[.E83]*[.E86]" office:value-type="float" office:value="52353.8552583151" calcext:value-type="float">
            <text:p>52354</text:p>
          </table:table-cell>
          <table:table-cell table:style-name="ce248" table:formula="of:=+[.F81]*[.F84]+[.F82]*[.F85]+[.F83]*[.F86]" office:value-type="float" office:value="53095.2887597428" calcext:value-type="float">
            <text:p>53095</text:p>
          </table:table-cell>
          <table:table-cell table:style-name="ce248" table:formula="of:=+[.G81]*[.G84]+[.G82]*[.G85]+[.G83]*[.G86]" office:value-type="float" office:value="53115.678181032" calcext:value-type="float">
            <text:p>53116</text:p>
          </table:table-cell>
          <table:table-cell table:style-name="ce248" table:formula="of:=+[.H81]*[.H84]+[.H82]*[.H85]+[.H83]*[.H86]" office:value-type="float" office:value="52378.3225638621" calcext:value-type="float">
            <text:p>52378</text:p>
          </table:table-cell>
          <table:table-cell table:style-name="ce248" table:formula="of:=+[.I81]*[.I84]+[.I82]*[.I85]+[.I83]*[.I86]" office:value-type="float" office:value="51511.2778700675" calcext:value-type="float">
            <text:p>51511</text:p>
          </table:table-cell>
          <table:table-cell table:style-name="ce248" table:formula="of:=+[.J81]*[.J84]+[.J82]*[.J85]+[.J83]*[.J86]" office:value-type="float" office:value="93914.9101808469" calcext:value-type="float">
            <text:p>93915</text:p>
          </table:table-cell>
          <table:table-cell table:style-name="ce248" table:formula="of:=+[.K81]*[.K84]+[.K82]*[.K85]+[.K83]*[.K86]" office:value-type="float" office:value="55648.291449659" calcext:value-type="float">
            <text:p>55648</text:p>
          </table:table-cell>
          <table:table-cell table:style-name="ce248" table:formula="of:=+[.L81]*[.L84]+[.L82]*[.L85]+[.L83]*[.L86]" office:value-type="float" office:value="56389.7249510867" calcext:value-type="float">
            <text:p>56390</text:p>
          </table:table-cell>
          <table:table-cell table:style-name="ce248" table:formula="of:=+[.M81]*[.M84]+[.M82]*[.M85]+[.M83]*[.M86]" office:value-type="float" office:value="56513.2972013246" calcext:value-type="float">
            <text:p>56513</text:p>
          </table:table-cell>
          <table:table-cell table:style-name="ce248" table:formula="of:=+[.N81]*[.N84]+[.N82]*[.N85]+[.N83]*[.N86]" office:value-type="float" office:value="61717.6043062213" calcext:value-type="float">
            <text:p>61718</text:p>
          </table:table-cell>
          <table:table-cell table:style-name="ce248" table:formula="of:=+[.O81]*[.O84]+[.O82]*[.O85]+[.O83]*[.O86]" office:value-type="float" office:value="98857.8001903652" calcext:value-type="float">
            <text:p>98858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Variacion KW</text:p>
          </table:table-cell>
          <table:table-cell table:style-name="ce249" table:formula="of:=[.D87]-[.O75]" office:value-type="float" office:value="-40530.9012102678" calcext:value-type="float">
            <text:p>-40531</text:p>
          </table:table-cell>
          <table:table-cell table:style-name="ce248" table:formula="of:=+[.E87]-[.D87]" office:value-type="float" office:value="494.289000951845" calcext:value-type="float">
            <text:p>494</text:p>
          </table:table-cell>
          <table:table-cell table:style-name="ce248" table:formula="of:=+[.F87]-[.E87]" office:value-type="float" office:value="741.433501427724" calcext:value-type="float">
            <text:p>741</text:p>
          </table:table-cell>
          <table:table-cell table:style-name="ce248" table:formula="of:=+[.G87]-[.F87]" office:value-type="float" office:value="20.3894212892628" calcext:value-type="float">
            <text:p>20</text:p>
          </table:table-cell>
          <table:table-cell table:style-name="ce248" table:formula="of:=+[.H87]-[.G87]" office:value-type="float" office:value="-737.355617169895" calcext:value-type="float">
            <text:p>-737</text:p>
          </table:table-cell>
          <table:table-cell table:style-name="ce248" table:formula="of:=+[.I87]-[.H87]" office:value-type="float" office:value="-867.044693794625" calcext:value-type="float">
            <text:p>-867</text:p>
          </table:table-cell>
          <table:table-cell table:style-name="ce248" table:formula="of:=+[.J87]-[.I87]" office:value-type="float" office:value="42403.6323107794" calcext:value-type="float">
            <text:p>42404</text:p>
          </table:table-cell>
          <table:table-cell table:style-name="ce248" table:formula="of:=+[.K87]-[.J87]" office:value-type="float" office:value="-38266.618731188" calcext:value-type="float">
            <text:p>-38267</text:p>
          </table:table-cell>
          <table:table-cell table:style-name="ce248" table:formula="of:=+[.L87]-[.K87]" office:value-type="float" office:value="741.433501427724" calcext:value-type="float">
            <text:p>741</text:p>
          </table:table-cell>
          <table:table-cell table:style-name="ce248" table:formula="of:=+[.M87]-[.L87]" office:value-type="float" office:value="123.572250237936" calcext:value-type="float">
            <text:p>124</text:p>
          </table:table-cell>
          <table:table-cell table:style-name="ce248" table:formula="of:=+[.N87]-[.M87]" office:value-type="float" office:value="5204.30710489661" calcext:value-type="float">
            <text:p>5204</text:p>
          </table:table-cell>
          <table:table-cell table:style-name="ce248" table:formula="of:=+[.O87]-[.N87]" office:value-type="float" office:value="37140.1958841439" calcext:value-type="float">
            <text:p>37140</text:p>
          </table:table-cell>
          <table:table-cell table:style-name="ce248"/>
          <table:table-cell table:style-name="ce261" table:formula="of:=SUM([.C88:.O88])" office:value-type="float" office:value="6467.33272273418" calcext:value-type="float">
            <text:p>6467</text:p>
          </table:table-cell>
          <table:table-cell office:value-type="float" office:value="7" calcext:value-type="float">
            <text:p>7</text:p>
          </table:table-cell>
          <table:table-cell table:number-columns-repeated="16367"/>
        </table:table-row>
        <table:table-row table:style-name="ro9">
          <table:table-cell/>
          <table:table-cell table:style-name="ce242" office:value-type="string" calcext:value-type="string">
            <text:p>TOTAL</text:p>
          </table:table-cell>
          <table:table-cell table:style-name="ce241"/>
          <table:table-cell table:style-name="ce248" table:formula="of:=SUM([.D87:.D88])" office:value-type="float" office:value="52353.8552583151" calcext:value-type="float">
            <text:p>52354</text:p>
          </table:table-cell>
          <table:table-cell table:style-name="ce248" table:formula="of:=SUM([.E87:.E88])" office:value-type="float" office:value="53095.2887597428" calcext:value-type="float">
            <text:p>53095</text:p>
          </table:table-cell>
          <table:table-cell table:style-name="ce248" table:formula="of:=SUM([.F87:.F88])" office:value-type="float" office:value="53115.678181032" calcext:value-type="float">
            <text:p>53116</text:p>
          </table:table-cell>
          <table:table-cell table:style-name="ce248" table:formula="of:=SUM([.G87:.G88])" office:value-type="float" office:value="52378.3225638621" calcext:value-type="float">
            <text:p>52378</text:p>
          </table:table-cell>
          <table:table-cell table:style-name="ce248" table:formula="of:=SUM([.H87:.H88])" office:value-type="float" office:value="51511.2778700675" calcext:value-type="float">
            <text:p>51511</text:p>
          </table:table-cell>
          <table:table-cell table:style-name="ce248" table:formula="of:=SUM([.I87:.I88])" office:value-type="float" office:value="93914.9101808469" calcext:value-type="float">
            <text:p>93915</text:p>
          </table:table-cell>
          <table:table-cell table:style-name="ce248" table:formula="of:=SUM([.J87:.J88])" office:value-type="float" office:value="55648.291449659" calcext:value-type="float">
            <text:p>55648</text:p>
          </table:table-cell>
          <table:table-cell table:style-name="ce248" table:formula="of:=SUM([.K87:.K88])" office:value-type="float" office:value="56389.7249510867" calcext:value-type="float">
            <text:p>56390</text:p>
          </table:table-cell>
          <table:table-cell table:style-name="ce248" table:formula="of:=SUM([.L87:.L88])" office:value-type="float" office:value="56513.2972013246" calcext:value-type="float">
            <text:p>56513</text:p>
          </table:table-cell>
          <table:table-cell table:style-name="ce248" table:formula="of:=SUM([.M87:.M88])" office:value-type="float" office:value="61717.6043062213" calcext:value-type="float">
            <text:p>61718</text:p>
          </table:table-cell>
          <table:table-cell table:style-name="ce248" table:formula="of:=SUM([.N87:.N88])" office:value-type="float" office:value="98857.8001903652" calcext:value-type="float">
            <text:p>98858</text:p>
          </table:table-cell>
          <table:table-cell table:style-name="ce248" table:formula="of:=SUM([.O87:.O88])" office:value-type="float" office:value="98857.8001903652" calcext:value-type="float">
            <text:p>98858</text:p>
          </table:table-cell>
          <table:table-cell table:style-name="ce246"/>
          <table:table-cell table:number-columns-repeated="16368"/>
        </table:table-row>
        <table:table-row table:style-name="ro9">
          <table:table-cell table:number-columns-repeated="16384"/>
        </table:table-row>
        <table:table-row table:style-name="ro9">
          <table:table-cell/>
          <table:table-cell table:style-name="ce239" office:value-type="string" calcext:value-type="string" table:number-columns-spanned="1" table:number-rows-spanned="2">
            <text:p>RUBRO</text:p>
          </table:table-cell>
          <table:table-cell table:style-name="ce239" office:value-type="float" office:value="7" calcext:value-type="float" table:number-columns-spanned="1" table:number-rows-spanned="2">
            <text:p>7</text:p>
          </table:table-cell>
          <table:table-cell table:style-name="ce239" office:value-type="string" calcext:value-type="string" table:number-columns-spanned="12" table:number-rows-spanned="1">
            <text:p>AÑO 8</text:p>
          </table:table-cell>
          <table:covered-table-cell table:number-columns-repeated="11" table:style-name="ce240"/>
          <table:table-cell table:style-name="ce259" office:value-type="string" calcext:value-type="string">
            <text:p>Total</text:p>
          </table:table-cell>
          <table:table-cell table:number-columns-repeated="16368"/>
        </table:table-row>
        <table:table-row table:style-name="ro9">
          <table:table-cell/>
          <table:covered-table-cell table:number-columns-repeated="2" table:style-name="ce240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62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DIESEL B5</text:p>
          </table:table-cell>
          <table:table-cell table:style-name="ce241"/>
          <table:table-cell table:style-name="ce254" table:formula="of:=+[$'Presupuesto de ventas'.C20]/2" office:value-type="float" office:value="3430.34589738818" calcext:value-type="float">
            <text:p>3,430</text:p>
          </table:table-cell>
          <table:table-cell table:style-name="ce254" table:formula="of:=+[$'Presupuesto de ventas'.D20]/2" office:value-type="float" office:value="3463.04154775526" calcext:value-type="float">
            <text:p>3,463</text:p>
          </table:table-cell>
          <table:table-cell table:style-name="ce254" table:formula="of:=+[$'Presupuesto de ventas'.E20]/2" office:value-type="float" office:value="3512.08502330588" calcext:value-type="float">
            <text:p>3,512</text:p>
          </table:table-cell>
          <table:table-cell table:style-name="ce254" table:formula="of:=+[$'Presupuesto de ventas'.F20]/2" office:value-type="float" office:value="3513.43371888352" calcext:value-type="float">
            <text:p>3,513</text:p>
          </table:table-cell>
          <table:table-cell table:style-name="ce254" table:formula="of:=+[$'Presupuesto de ventas'.G20]/2" office:value-type="float" office:value="3464.65998244843" calcext:value-type="float">
            <text:p>3,465</text:p>
          </table:table-cell>
          <table:table-cell table:style-name="ce254" table:formula="of:=+[$'Presupuesto de ventas'.H20]/2" office:value-type="float" office:value="3407.30772474828" calcext:value-type="float">
            <text:p>3,407</text:p>
          </table:table-cell>
          <table:table-cell table:style-name="ce254" table:formula="of:=+[$'Presupuesto de ventas'.I20]/2" office:value-type="float" office:value="6212.17356974532" calcext:value-type="float">
            <text:p>6,212</text:p>
          </table:table-cell>
          <table:table-cell table:style-name="ce254" table:formula="of:=+[$'Presupuesto de ventas'.J20]/2" office:value-type="float" office:value="3680.95805745186" calcext:value-type="float">
            <text:p>3,681</text:p>
          </table:table-cell>
          <table:table-cell table:style-name="ce254" table:formula="of:=+[$'Presupuesto de ventas'.K20]/2" office:value-type="float" office:value="3730.00153300248" calcext:value-type="float">
            <text:p>3,730</text:p>
          </table:table-cell>
          <table:table-cell table:style-name="ce254" table:formula="of:=+[$'Presupuesto de ventas'.L20]/2" office:value-type="float" office:value="3738.17544559424" calcext:value-type="float">
            <text:p>3,738</text:p>
          </table:table-cell>
          <table:table-cell table:style-name="ce254" table:formula="of:=+[$'Presupuesto de ventas'.M20]/2" office:value-type="float" office:value="4082.42386135294" calcext:value-type="float">
            <text:p>4,082</text:p>
          </table:table-cell>
          <table:table-cell table:style-name="ce254" table:formula="of:=+[$'Presupuesto de ventas'.N20]/2" office:value-type="float" office:value="6539.13007341612" calcext:value-type="float">
            <text:p>6,539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GASOGHOL 90</text:p>
          </table:table-cell>
          <table:table-cell table:style-name="ce241"/>
          <table:table-cell table:style-name="ce254" table:formula="of:=+[$'Presupuesto de ventas'.C35]/2" office:value-type="float" office:value="2744.27671791055" calcext:value-type="float">
            <text:p>2,744</text:p>
          </table:table-cell>
          <table:table-cell table:style-name="ce254" table:formula="of:=+[$'Presupuesto de ventas'.D35]/2" office:value-type="float" office:value="2770.43323820421" calcext:value-type="float">
            <text:p>2,770</text:p>
          </table:table-cell>
          <table:table-cell table:style-name="ce254" table:formula="of:=+[$'Presupuesto de ventas'.E35]/2" office:value-type="float" office:value="2809.66801864471" calcext:value-type="float">
            <text:p>2,810</text:p>
          </table:table-cell>
          <table:table-cell table:style-name="ce254" table:formula="of:=+[$'Presupuesto de ventas'.F35]/2" office:value-type="float" office:value="2810.74697510682" calcext:value-type="float">
            <text:p>2,811</text:p>
          </table:table-cell>
          <table:table-cell table:style-name="ce254" table:formula="of:=+[$'Presupuesto de ventas'.G35]/2" office:value-type="float" office:value="2771.72798595875" calcext:value-type="float">
            <text:p>2,772</text:p>
          </table:table-cell>
          <table:table-cell table:style-name="ce254" table:formula="of:=+[$'Presupuesto de ventas'.H35]/2" office:value-type="float" office:value="2725.84617979862" calcext:value-type="float">
            <text:p>2,726</text:p>
          </table:table-cell>
          <table:table-cell table:style-name="ce254" table:formula="of:=+[$'Presupuesto de ventas'.I35]/2" office:value-type="float" office:value="4969.73885579625" calcext:value-type="float">
            <text:p>4,970</text:p>
          </table:table-cell>
          <table:table-cell table:style-name="ce254" table:formula="of:=+[$'Presupuesto de ventas'.J35]/2" office:value-type="float" office:value="2944.76644596148" calcext:value-type="float">
            <text:p>2,945</text:p>
          </table:table-cell>
          <table:table-cell table:style-name="ce254" table:formula="of:=+[$'Presupuesto de ventas'.K35]/2" office:value-type="float" office:value="2984.00122640198" calcext:value-type="float">
            <text:p>2,984</text:p>
          </table:table-cell>
          <table:table-cell table:style-name="ce254" table:formula="of:=+[$'Presupuesto de ventas'.L35]/2" office:value-type="float" office:value="2990.5403564754" calcext:value-type="float">
            <text:p>2,991</text:p>
          </table:table-cell>
          <table:table-cell table:style-name="ce254" table:formula="of:=+[$'Presupuesto de ventas'.M35]/2" office:value-type="float" office:value="3265.93908908235" calcext:value-type="float">
            <text:p>3,266</text:p>
          </table:table-cell>
          <table:table-cell table:style-name="ce254" table:formula="of:=+[$'Presupuesto de ventas'.N35]/2" office:value-type="float" office:value="5231.3040587329" calcext:value-type="float">
            <text:p>5,231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GASOHOL 95</text:p>
          </table:table-cell>
          <table:table-cell table:style-name="ce241"/>
          <table:table-cell table:style-name="ce254" table:formula="of:=+[$'Presupuesto de ventas'.C50]/2" office:value-type="float" office:value="633.294627210126" calcext:value-type="float">
            <text:p>633</text:p>
          </table:table-cell>
          <table:table-cell table:style-name="ce254" table:formula="of:=+[$'Presupuesto de ventas'.D50]/2" office:value-type="float" office:value="639.330747277895" calcext:value-type="float">
            <text:p>639</text:p>
          </table:table-cell>
          <table:table-cell table:style-name="ce254" table:formula="of:=+[$'Presupuesto de ventas'.E50]/2" office:value-type="float" office:value="648.384927379548" calcext:value-type="float">
            <text:p>648</text:p>
          </table:table-cell>
          <table:table-cell table:style-name="ce254" table:formula="of:=+[$'Presupuesto de ventas'.F50]/2" office:value-type="float" office:value="648.633917332343" calcext:value-type="float">
            <text:p>649</text:p>
          </table:table-cell>
          <table:table-cell table:style-name="ce254" table:formula="of:=+[$'Presupuesto de ventas'.G50]/2" office:value-type="float" office:value="639.629535221249" calcext:value-type="float">
            <text:p>640</text:p>
          </table:table-cell>
          <table:table-cell table:style-name="ce254" table:formula="of:=+[$'Presupuesto de ventas'.H50]/2" office:value-type="float" office:value="629.041426107374" calcext:value-type="float">
            <text:p>629</text:p>
          </table:table-cell>
          <table:table-cell table:style-name="ce254" table:formula="of:=+[$'Presupuesto de ventas'.I50]/2" office:value-type="float" office:value="1146.86281287606" calcext:value-type="float">
            <text:p>1,147</text:p>
          </table:table-cell>
          <table:table-cell table:style-name="ce254" table:formula="of:=+[$'Presupuesto de ventas'.J50]/2" office:value-type="float" office:value="679.561487529573" calcext:value-type="float">
            <text:p>680</text:p>
          </table:table-cell>
          <table:table-cell table:style-name="ce254" table:formula="of:=+[$'Presupuesto de ventas'.K50]/2" office:value-type="float" office:value="688.615667631226" calcext:value-type="float">
            <text:p>689</text:p>
          </table:table-cell>
          <table:table-cell table:style-name="ce254" table:formula="of:=+[$'Presupuesto de ventas'.L50]/2" office:value-type="float" office:value="690.124697648168" calcext:value-type="float">
            <text:p>690</text:p>
          </table:table-cell>
          <table:table-cell table:style-name="ce254" table:formula="of:=+[$'Presupuesto de ventas'.M50]/2" office:value-type="float" office:value="753.678251326696" calcext:value-type="float">
            <text:p>754</text:p>
          </table:table-cell>
          <table:table-cell table:style-name="ce254" table:formula="of:=+[$'Presupuesto de ventas'.N50]/2" office:value-type="float" office:value="1207.22401355375" calcext:value-type="float">
            <text:p>1,207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valor de compra DB5</text:p>
          </table:table-cell>
          <table:table-cell table:style-name="ce241"/>
          <table:table-cell table:style-name="ce255" table:formula="of:=+[.D84]" office:value-type="float" office:value="8.05889830508475" calcext:value-type="float">
            <text:p>8.06</text:p>
          </table:table-cell>
          <table:table-cell table:style-name="ce255" table:formula="of:=+[.E84]" office:value-type="float" office:value="8.05889830508475" calcext:value-type="float">
            <text:p>8.06</text:p>
          </table:table-cell>
          <table:table-cell table:style-name="ce255" table:formula="of:=+[.F84]" office:value-type="float" office:value="8.05889830508475" calcext:value-type="float">
            <text:p>8.06</text:p>
          </table:table-cell>
          <table:table-cell table:style-name="ce255" table:formula="of:=+[.G84]" office:value-type="float" office:value="8.05889830508475" calcext:value-type="float">
            <text:p>8.06</text:p>
          </table:table-cell>
          <table:table-cell table:style-name="ce255" table:formula="of:=+[.H84]" office:value-type="float" office:value="8.05889830508475" calcext:value-type="float">
            <text:p>8.06</text:p>
          </table:table-cell>
          <table:table-cell table:style-name="ce255" table:formula="of:=+[.I84]" office:value-type="float" office:value="8.05889830508475" calcext:value-type="float">
            <text:p>8.06</text:p>
          </table:table-cell>
          <table:table-cell table:style-name="ce255" table:formula="of:=+[.J84]" office:value-type="float" office:value="8.05889830508475" calcext:value-type="float">
            <text:p>8.06</text:p>
          </table:table-cell>
          <table:table-cell table:style-name="ce255" table:formula="of:=+[.K84]" office:value-type="float" office:value="8.05889830508475" calcext:value-type="float">
            <text:p>8.06</text:p>
          </table:table-cell>
          <table:table-cell table:style-name="ce255" table:formula="of:=+[.L84]" office:value-type="float" office:value="8.05889830508475" calcext:value-type="float">
            <text:p>8.06</text:p>
          </table:table-cell>
          <table:table-cell table:style-name="ce255" table:formula="of:=+[.M84]" office:value-type="float" office:value="8.05889830508475" calcext:value-type="float">
            <text:p>8.06</text:p>
          </table:table-cell>
          <table:table-cell table:style-name="ce255" table:formula="of:=+[.N84]" office:value-type="float" office:value="8.05889830508475" calcext:value-type="float">
            <text:p>8.06</text:p>
          </table:table-cell>
          <table:table-cell table:style-name="ce255" table:formula="of:=+[.O84]" office:value-type="float" office:value="8.05889830508475" calcext:value-type="float">
            <text:p>8.06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valor de compra G90</text:p>
          </table:table-cell>
          <table:table-cell table:style-name="ce241"/>
          <table:table-cell table:style-name="ce255" table:formula="of:=+[.D85]" office:value-type="float" office:value="8.19576271186441" calcext:value-type="float">
            <text:p>8.20</text:p>
          </table:table-cell>
          <table:table-cell table:style-name="ce255" table:formula="of:=+[.E85]" office:value-type="float" office:value="8.19576271186441" calcext:value-type="float">
            <text:p>8.20</text:p>
          </table:table-cell>
          <table:table-cell table:style-name="ce255" table:formula="of:=+[.F85]" office:value-type="float" office:value="8.19576271186441" calcext:value-type="float">
            <text:p>8.20</text:p>
          </table:table-cell>
          <table:table-cell table:style-name="ce255" table:formula="of:=+[.G85]" office:value-type="float" office:value="8.19576271186441" calcext:value-type="float">
            <text:p>8.20</text:p>
          </table:table-cell>
          <table:table-cell table:style-name="ce255" table:formula="of:=+[.H85]" office:value-type="float" office:value="8.19576271186441" calcext:value-type="float">
            <text:p>8.20</text:p>
          </table:table-cell>
          <table:table-cell table:style-name="ce255" table:formula="of:=+[.I85]" office:value-type="float" office:value="8.19576271186441" calcext:value-type="float">
            <text:p>8.20</text:p>
          </table:table-cell>
          <table:table-cell table:style-name="ce255" table:formula="of:=+[.J85]" office:value-type="float" office:value="8.19576271186441" calcext:value-type="float">
            <text:p>8.20</text:p>
          </table:table-cell>
          <table:table-cell table:style-name="ce255" table:formula="of:=+[.K85]" office:value-type="float" office:value="8.19576271186441" calcext:value-type="float">
            <text:p>8.20</text:p>
          </table:table-cell>
          <table:table-cell table:style-name="ce255" table:formula="of:=+[.L85]" office:value-type="float" office:value="8.19576271186441" calcext:value-type="float">
            <text:p>8.20</text:p>
          </table:table-cell>
          <table:table-cell table:style-name="ce255" table:formula="of:=+[.M85]" office:value-type="float" office:value="8.19576271186441" calcext:value-type="float">
            <text:p>8.20</text:p>
          </table:table-cell>
          <table:table-cell table:style-name="ce255" table:formula="of:=+[.N85]" office:value-type="float" office:value="8.19576271186441" calcext:value-type="float">
            <text:p>8.20</text:p>
          </table:table-cell>
          <table:table-cell table:style-name="ce255" table:formula="of:=+[.O85]" office:value-type="float" office:value="8.19576271186441" calcext:value-type="float">
            <text:p>8.20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valor de compra G95</text:p>
          </table:table-cell>
          <table:table-cell table:style-name="ce241"/>
          <table:table-cell table:style-name="ce255" table:formula="of:=+[.D86]" office:value-type="float" office:value="8.45338983050847" calcext:value-type="float">
            <text:p>8.45</text:p>
          </table:table-cell>
          <table:table-cell table:style-name="ce255" table:formula="of:=+[.E86]" office:value-type="float" office:value="8.45338983050847" calcext:value-type="float">
            <text:p>8.45</text:p>
          </table:table-cell>
          <table:table-cell table:style-name="ce255" table:formula="of:=+[.F86]" office:value-type="float" office:value="8.45338983050847" calcext:value-type="float">
            <text:p>8.45</text:p>
          </table:table-cell>
          <table:table-cell table:style-name="ce255" table:formula="of:=+[.G86]" office:value-type="float" office:value="8.45338983050847" calcext:value-type="float">
            <text:p>8.45</text:p>
          </table:table-cell>
          <table:table-cell table:style-name="ce255" table:formula="of:=+[.H86]" office:value-type="float" office:value="8.45338983050847" calcext:value-type="float">
            <text:p>8.45</text:p>
          </table:table-cell>
          <table:table-cell table:style-name="ce255" table:formula="of:=+[.I86]" office:value-type="float" office:value="8.45338983050847" calcext:value-type="float">
            <text:p>8.45</text:p>
          </table:table-cell>
          <table:table-cell table:style-name="ce255" table:formula="of:=+[.J86]" office:value-type="float" office:value="8.45338983050847" calcext:value-type="float">
            <text:p>8.45</text:p>
          </table:table-cell>
          <table:table-cell table:style-name="ce255" table:formula="of:=+[.K86]" office:value-type="float" office:value="8.45338983050847" calcext:value-type="float">
            <text:p>8.45</text:p>
          </table:table-cell>
          <table:table-cell table:style-name="ce255" table:formula="of:=+[.L86]" office:value-type="float" office:value="8.45338983050847" calcext:value-type="float">
            <text:p>8.45</text:p>
          </table:table-cell>
          <table:table-cell table:style-name="ce255" table:formula="of:=+[.M86]" office:value-type="float" office:value="8.45338983050847" calcext:value-type="float">
            <text:p>8.45</text:p>
          </table:table-cell>
          <table:table-cell table:style-name="ce255" table:formula="of:=+[.N86]" office:value-type="float" office:value="8.45338983050847" calcext:value-type="float">
            <text:p>8.45</text:p>
          </table:table-cell>
          <table:table-cell table:style-name="ce255" table:formula="of:=+[.O86]" office:value-type="float" office:value="8.45338983050847" calcext:value-type="float">
            <text:p>8.45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Capital de Trabajo</text:p>
          </table:table-cell>
          <table:table-cell table:style-name="ce248"/>
          <table:table-cell table:style-name="ce248" table:formula="of:=+[.D93]*[.D96]+[.D94]*[.D97]+[.D95]*[.D98]" office:value-type="float" office:value="55489.7358953786" calcext:value-type="float">
            <text:p>55490</text:p>
          </table:table-cell>
          <table:table-cell table:style-name="ce248" table:formula="of:=+[.E93]*[.E96]+[.E94]*[.E97]+[.E95]*[.E98]" office:value-type="float" office:value="56018.6251263971" calcext:value-type="float">
            <text:p>56019</text:p>
          </table:table-cell>
          <table:table-cell table:style-name="ce248" table:formula="of:=+[.F93]*[.F96]+[.F94]*[.F97]+[.F95]*[.F98]" office:value-type="float" office:value="56811.9589729248" calcext:value-type="float">
            <text:p>56812</text:p>
          </table:table-cell>
          <table:table-cell table:style-name="ce248" table:formula="of:=+[.G93]*[.G96]+[.G94]*[.G97]+[.G95]*[.G98]" office:value-type="float" office:value="56833.7756537043" calcext:value-type="float">
            <text:p>56834</text:p>
          </table:table-cell>
          <table:table-cell table:style-name="ce248" table:formula="of:=+[.H93]*[.H96]+[.H94]*[.H97]+[.H95]*[.H98]" office:value-type="float" office:value="56044.8051433325" calcext:value-type="float">
            <text:p>56045</text:p>
          </table:table-cell>
          <table:table-cell table:style-name="ce248" table:formula="of:=+[.I93]*[.I96]+[.I94]*[.I97]+[.I95]*[.I98]" office:value-type="float" office:value="55117.0673209723" calcext:value-type="float">
            <text:p>55117</text:p>
          </table:table-cell>
          <table:table-cell table:style-name="ce248" table:formula="of:=+[.J93]*[.J96]+[.J94]*[.J97]+[.J95]*[.J98]" office:value-type="float" office:value="100488.953893506" calcext:value-type="float">
            <text:p>100489</text:p>
          </table:table-cell>
          <table:table-cell table:style-name="ce248" table:formula="of:=+[.K93]*[.K96]+[.K94]*[.K97]+[.K95]*[.K98]" office:value-type="float" office:value="59543.6718511351" calcext:value-type="float">
            <text:p>59544</text:p>
          </table:table-cell>
          <table:table-cell table:style-name="ce248" table:formula="of:=+[.L93]*[.L96]+[.L94]*[.L97]+[.L95]*[.L98]" office:value-type="float" office:value="60337.0056976628" calcext:value-type="float">
            <text:p>60337</text:p>
          </table:table-cell>
          <table:table-cell table:style-name="ce248" table:formula="of:=+[.M93]*[.M96]+[.M94]*[.M97]+[.M95]*[.M98]" office:value-type="float" office:value="60469.2280054174" calcext:value-type="float">
            <text:p>60469</text:p>
          </table:table-cell>
          <table:table-cell table:style-name="ce248" table:formula="of:=+[.N93]*[.N96]+[.N94]*[.N97]+[.N95]*[.N98]" office:value-type="float" office:value="66037.8366076568" calcext:value-type="float">
            <text:p>66038</text:p>
          </table:table-cell>
          <table:table-cell table:style-name="ce248" table:formula="of:=+[.O93]*[.O96]+[.O94]*[.O97]+[.O95]*[.O98]" office:value-type="float" office:value="105777.846203691" calcext:value-type="float">
            <text:p>105778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Variacion KW</text:p>
          </table:table-cell>
          <table:table-cell table:style-name="ce249" table:formula="of:=[.D99]-[.O87]" office:value-type="float" office:value="-43368.0642949866" calcext:value-type="float">
            <text:p>-43368</text:p>
          </table:table-cell>
          <table:table-cell table:style-name="ce248" table:formula="of:=+[.E99]-[.D99]" office:value-type="float" office:value="528.889231018467" calcext:value-type="float">
            <text:p>529</text:p>
          </table:table-cell>
          <table:table-cell table:style-name="ce248" table:formula="of:=+[.F99]-[.E99]" office:value-type="float" office:value="793.333846527676" calcext:value-type="float">
            <text:p>793</text:p>
          </table:table-cell>
          <table:table-cell table:style-name="ce248" table:formula="of:=+[.G99]-[.F99]" office:value-type="float" office:value="21.8166807794987" calcext:value-type="float">
            <text:p>22</text:p>
          </table:table-cell>
          <table:table-cell table:style-name="ce248" table:formula="of:=+[.H99]-[.G99]" office:value-type="float" office:value="-788.970510371772" calcext:value-type="float">
            <text:p>-789</text:p>
          </table:table-cell>
          <table:table-cell table:style-name="ce248" table:formula="of:=+[.I99]-[.H99]" office:value-type="float" office:value="-927.737822360257" calcext:value-type="float">
            <text:p>-928</text:p>
          </table:table-cell>
          <table:table-cell table:style-name="ce248" table:formula="of:=+[.J99]-[.I99]" office:value-type="float" office:value="45371.886572534" calcext:value-type="float">
            <text:p>45372</text:p>
          </table:table-cell>
          <table:table-cell table:style-name="ce248" table:formula="of:=+[.K99]-[.J99]" office:value-type="float" office:value="-40945.2820423711" calcext:value-type="float">
            <text:p>-40945</text:p>
          </table:table-cell>
          <table:table-cell table:style-name="ce248" table:formula="of:=+[.L99]-[.K99]" office:value-type="float" office:value="793.333846527668" calcext:value-type="float">
            <text:p>793</text:p>
          </table:table-cell>
          <table:table-cell table:style-name="ce248" table:formula="of:=+[.M99]-[.L99]" office:value-type="float" office:value="132.222307754586" calcext:value-type="float">
            <text:p>132</text:p>
          </table:table-cell>
          <table:table-cell table:style-name="ce248" table:formula="of:=+[.N99]-[.M99]" office:value-type="float" office:value="5568.60860223938" calcext:value-type="float">
            <text:p>5569</text:p>
          </table:table-cell>
          <table:table-cell table:style-name="ce248" table:formula="of:=+[.O99]-[.N99]" office:value-type="float" office:value="39740.009596034" calcext:value-type="float">
            <text:p>39740</text:p>
          </table:table-cell>
          <table:table-cell table:style-name="ce248"/>
          <table:table-cell table:style-name="ce261" table:formula="of:=SUM([.C100:.O100])" office:value-type="float" office:value="6920.04601332558" calcext:value-type="float">
            <text:p>6920</text:p>
          </table:table-cell>
          <table:table-cell office:value-type="float" office:value="8" calcext:value-type="float">
            <text:p>8</text:p>
          </table:table-cell>
          <table:table-cell table:number-columns-repeated="16367"/>
        </table:table-row>
        <table:table-row table:style-name="ro9">
          <table:table-cell/>
          <table:table-cell table:style-name="ce242" office:value-type="string" calcext:value-type="string">
            <text:p>TOTAL</text:p>
          </table:table-cell>
          <table:table-cell table:style-name="ce241"/>
          <table:table-cell table:style-name="ce248" table:formula="of:=SUM([.D99:.D100])" office:value-type="float" office:value="56018.6251263971" calcext:value-type="float">
            <text:p>56019</text:p>
          </table:table-cell>
          <table:table-cell table:style-name="ce248" table:formula="of:=SUM([.E99:.E100])" office:value-type="float" office:value="56811.9589729248" calcext:value-type="float">
            <text:p>56812</text:p>
          </table:table-cell>
          <table:table-cell table:style-name="ce248" table:formula="of:=SUM([.F99:.F100])" office:value-type="float" office:value="56833.7756537043" calcext:value-type="float">
            <text:p>56834</text:p>
          </table:table-cell>
          <table:table-cell table:style-name="ce248" table:formula="of:=SUM([.G99:.G100])" office:value-type="float" office:value="56044.8051433325" calcext:value-type="float">
            <text:p>56045</text:p>
          </table:table-cell>
          <table:table-cell table:style-name="ce248" table:formula="of:=SUM([.H99:.H100])" office:value-type="float" office:value="55117.0673209723" calcext:value-type="float">
            <text:p>55117</text:p>
          </table:table-cell>
          <table:table-cell table:style-name="ce248" table:formula="of:=SUM([.I99:.I100])" office:value-type="float" office:value="100488.953893506" calcext:value-type="float">
            <text:p>100489</text:p>
          </table:table-cell>
          <table:table-cell table:style-name="ce248" table:formula="of:=SUM([.J99:.J100])" office:value-type="float" office:value="59543.6718511351" calcext:value-type="float">
            <text:p>59544</text:p>
          </table:table-cell>
          <table:table-cell table:style-name="ce248" table:formula="of:=SUM([.K99:.K100])" office:value-type="float" office:value="60337.0056976628" calcext:value-type="float">
            <text:p>60337</text:p>
          </table:table-cell>
          <table:table-cell table:style-name="ce248" table:formula="of:=SUM([.L99:.L100])" office:value-type="float" office:value="60469.2280054174" calcext:value-type="float">
            <text:p>60469</text:p>
          </table:table-cell>
          <table:table-cell table:style-name="ce248" table:formula="of:=SUM([.M99:.M100])" office:value-type="float" office:value="66037.8366076568" calcext:value-type="float">
            <text:p>66038</text:p>
          </table:table-cell>
          <table:table-cell table:style-name="ce248" table:formula="of:=SUM([.N99:.N100])" office:value-type="float" office:value="105777.846203691" calcext:value-type="float">
            <text:p>105778</text:p>
          </table:table-cell>
          <table:table-cell table:style-name="ce248" table:formula="of:=SUM([.O99:.O100])" office:value-type="float" office:value="105777.846203691" calcext:value-type="float">
            <text:p>105778</text:p>
          </table:table-cell>
          <table:table-cell table:style-name="ce246"/>
          <table:table-cell table:number-columns-repeated="16368"/>
        </table:table-row>
        <table:table-row table:style-name="ro9">
          <table:table-cell table:number-columns-repeated="16384"/>
        </table:table-row>
        <table:table-row table:style-name="ro9">
          <table:table-cell/>
          <table:table-cell table:style-name="ce239" office:value-type="string" calcext:value-type="string" table:number-columns-spanned="1" table:number-rows-spanned="2">
            <text:p>RUBRO</text:p>
          </table:table-cell>
          <table:table-cell table:style-name="ce239" office:value-type="float" office:value="8" calcext:value-type="float" table:number-columns-spanned="1" table:number-rows-spanned="2">
            <text:p>8</text:p>
          </table:table-cell>
          <table:table-cell table:style-name="ce239" office:value-type="string" calcext:value-type="string" table:number-columns-spanned="12" table:number-rows-spanned="1">
            <text:p>AÑO 9</text:p>
          </table:table-cell>
          <table:covered-table-cell table:number-columns-repeated="11" table:style-name="ce240"/>
          <table:table-cell table:style-name="ce259" office:value-type="string" calcext:value-type="string">
            <text:p>Total</text:p>
          </table:table-cell>
          <table:table-cell table:number-columns-repeated="16368"/>
        </table:table-row>
        <table:table-row table:style-name="ro9">
          <table:table-cell/>
          <table:covered-table-cell table:number-columns-repeated="2" table:style-name="ce240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62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DIESEL B5</text:p>
          </table:table-cell>
          <table:table-cell table:style-name="ce241"/>
          <table:table-cell table:style-name="ce254" table:formula="of:=+[$'Presupuesto de ventas'.C21]/2" office:value-type="float" office:value="3670.47011020535" calcext:value-type="float">
            <text:p>3,670</text:p>
          </table:table-cell>
          <table:table-cell table:style-name="ce254" table:formula="of:=+[$'Presupuesto de ventas'.D21]/2" office:value-type="float" office:value="3705.45445609813" calcext:value-type="float">
            <text:p>3,705</text:p>
          </table:table-cell>
          <table:table-cell table:style-name="ce254" table:formula="of:=+[$'Presupuesto de ventas'.E21]/2" office:value-type="float" office:value="3757.93097493729" calcext:value-type="float">
            <text:p>3,758</text:p>
          </table:table-cell>
          <table:table-cell table:style-name="ce254" table:formula="of:=+[$'Presupuesto de ventas'.F21]/2" office:value-type="float" office:value="3759.37407920537" calcext:value-type="float">
            <text:p>3,759</text:p>
          </table:table-cell>
          <table:table-cell table:style-name="ce254" table:formula="of:=+[$'Presupuesto de ventas'.G21]/2" office:value-type="float" office:value="3707.18618121982" calcext:value-type="float">
            <text:p>3,707</text:p>
          </table:table-cell>
          <table:table-cell table:style-name="ce254" table:formula="of:=+[$'Presupuesto de ventas'.H21]/2" office:value-type="float" office:value="3645.81926548066" calcext:value-type="float">
            <text:p>3,646</text:p>
          </table:table-cell>
          <table:table-cell table:style-name="ce254" table:formula="of:=+[$'Presupuesto de ventas'.I21]/2" office:value-type="float" office:value="6647.02571962749" calcext:value-type="float">
            <text:p>6,647</text:p>
          </table:table-cell>
          <table:table-cell table:style-name="ce254" table:formula="of:=+[$'Presupuesto de ventas'.J21]/2" office:value-type="float" office:value="3938.62512147349" calcext:value-type="float">
            <text:p>3,939</text:p>
          </table:table-cell>
          <table:table-cell table:style-name="ce254" table:formula="of:=+[$'Presupuesto de ventas'.K21]/2" office:value-type="float" office:value="3991.10164031265" calcext:value-type="float">
            <text:p>3,991</text:p>
          </table:table-cell>
          <table:table-cell table:style-name="ce254" table:formula="of:=+[$'Presupuesto de ventas'.L21]/2" office:value-type="float" office:value="3999.84772678584" calcext:value-type="float">
            <text:p>4,000</text:p>
          </table:table-cell>
          <table:table-cell table:style-name="ce254" table:formula="of:=+[$'Presupuesto de ventas'.M21]/2" office:value-type="float" office:value="4368.19353164764" calcext:value-type="float">
            <text:p>4,368</text:p>
          </table:table-cell>
          <table:table-cell table:style-name="ce254" table:formula="of:=+[$'Presupuesto de ventas'.N21]/2" office:value-type="float" office:value="6996.86917855525" calcext:value-type="float">
            <text:p>6,997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GASOGHOL 90</text:p>
          </table:table-cell>
          <table:table-cell table:style-name="ce241"/>
          <table:table-cell table:style-name="ce254" table:formula="of:=+[$'Presupuesto de ventas'.C36]/2" office:value-type="float" office:value="2936.37608816428" calcext:value-type="float">
            <text:p>2,936</text:p>
          </table:table-cell>
          <table:table-cell table:style-name="ce254" table:formula="of:=+[$'Presupuesto de ventas'.D36]/2" office:value-type="float" office:value="2964.36356487851" calcext:value-type="float">
            <text:p>2,964</text:p>
          </table:table-cell>
          <table:table-cell table:style-name="ce254" table:formula="of:=+[$'Presupuesto de ventas'.E36]/2" office:value-type="float" office:value="3006.34477994984" calcext:value-type="float">
            <text:p>3,006</text:p>
          </table:table-cell>
          <table:table-cell table:style-name="ce254" table:formula="of:=+[$'Presupuesto de ventas'.F36]/2" office:value-type="float" office:value="3007.4992633643" calcext:value-type="float">
            <text:p>3,007</text:p>
          </table:table-cell>
          <table:table-cell table:style-name="ce254" table:formula="of:=+[$'Presupuesto de ventas'.G36]/2" office:value-type="float" office:value="2965.74894497586" calcext:value-type="float">
            <text:p>2,966</text:p>
          </table:table-cell>
          <table:table-cell table:style-name="ce254" table:formula="of:=+[$'Presupuesto de ventas'.H36]/2" office:value-type="float" office:value="2916.65541238453" calcext:value-type="float">
            <text:p>2,917</text:p>
          </table:table-cell>
          <table:table-cell table:style-name="ce254" table:formula="of:=+[$'Presupuesto de ventas'.I36]/2" office:value-type="float" office:value="5317.62057570199" calcext:value-type="float">
            <text:p>5,318</text:p>
          </table:table-cell>
          <table:table-cell table:style-name="ce254" table:formula="of:=+[$'Presupuesto de ventas'.J36]/2" office:value-type="float" office:value="3150.90009717879" calcext:value-type="float">
            <text:p>3,151</text:p>
          </table:table-cell>
          <table:table-cell table:style-name="ce254" table:formula="of:=+[$'Presupuesto de ventas'.K36]/2" office:value-type="float" office:value="3192.88131225012" calcext:value-type="float">
            <text:p>3,193</text:p>
          </table:table-cell>
          <table:table-cell table:style-name="ce254" table:formula="of:=+[$'Presupuesto de ventas'.L36]/2" office:value-type="float" office:value="3199.87818142867" calcext:value-type="float">
            <text:p>3,200</text:p>
          </table:table-cell>
          <table:table-cell table:style-name="ce254" table:formula="of:=+[$'Presupuesto de ventas'.M36]/2" office:value-type="float" office:value="3494.55482531812" calcext:value-type="float">
            <text:p>3,495</text:p>
          </table:table-cell>
          <table:table-cell table:style-name="ce254" table:formula="of:=+[$'Presupuesto de ventas'.N36]/2" office:value-type="float" office:value="5597.4953428442" calcext:value-type="float">
            <text:p>5,597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GASOHOL 95</text:p>
          </table:table-cell>
          <table:table-cell table:style-name="ce241"/>
          <table:table-cell table:style-name="ce254" table:formula="of:=+[$'Presupuesto de ventas'.C51]/2" office:value-type="float" office:value="677.625251114835" calcext:value-type="float">
            <text:p>678</text:p>
          </table:table-cell>
          <table:table-cell table:style-name="ce254" table:formula="of:=+[$'Presupuesto de ventas'.D51]/2" office:value-type="float" office:value="684.083899587347" calcext:value-type="float">
            <text:p>684</text:p>
          </table:table-cell>
          <table:table-cell table:style-name="ce254" table:formula="of:=+[$'Presupuesto de ventas'.E51]/2" office:value-type="float" office:value="693.771872296116" calcext:value-type="float">
            <text:p>694</text:p>
          </table:table-cell>
          <table:table-cell table:style-name="ce254" table:formula="of:=+[$'Presupuesto de ventas'.F51]/2" office:value-type="float" office:value="694.038291545607" calcext:value-type="float">
            <text:p>694</text:p>
          </table:table-cell>
          <table:table-cell table:style-name="ce254" table:formula="of:=+[$'Presupuesto de ventas'.G51]/2" office:value-type="float" office:value="684.403602686736" calcext:value-type="float">
            <text:p>684</text:p>
          </table:table-cell>
          <table:table-cell table:style-name="ce254" table:formula="of:=+[$'Presupuesto de ventas'.H51]/2" office:value-type="float" office:value="673.07432593489" calcext:value-type="float">
            <text:p>673</text:p>
          </table:table-cell>
          <table:table-cell table:style-name="ce254" table:formula="of:=+[$'Presupuesto de ventas'.I51]/2" office:value-type="float" office:value="1227.14320977738" calcext:value-type="float">
            <text:p>1,227</text:p>
          </table:table-cell>
          <table:table-cell table:style-name="ce254" table:formula="of:=+[$'Presupuesto de ventas'.J51]/2" office:value-type="float" office:value="727.130791656643" calcext:value-type="float">
            <text:p>727</text:p>
          </table:table-cell>
          <table:table-cell table:style-name="ce254" table:formula="of:=+[$'Presupuesto de ventas'.K51]/2" office:value-type="float" office:value="736.818764365412" calcext:value-type="float">
            <text:p>737</text:p>
          </table:table-cell>
          <table:table-cell table:style-name="ce254" table:formula="of:=+[$'Presupuesto de ventas'.L51]/2" office:value-type="float" office:value="738.43342648354" calcext:value-type="float">
            <text:p>738</text:p>
          </table:table-cell>
          <table:table-cell table:style-name="ce254" table:formula="of:=+[$'Presupuesto de ventas'.M51]/2" office:value-type="float" office:value="806.435728919565" calcext:value-type="float">
            <text:p>806</text:p>
          </table:table-cell>
          <table:table-cell table:style-name="ce254" table:formula="of:=+[$'Presupuesto de ventas'.N51]/2" office:value-type="float" office:value="1291.72969450251" calcext:value-type="float">
            <text:p>1,292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valor de compra DB5</text:p>
          </table:table-cell>
          <table:table-cell table:style-name="ce241"/>
          <table:table-cell table:style-name="ce255" table:formula="of:=+[.D96]" office:value-type="float" office:value="8.05889830508475" calcext:value-type="float">
            <text:p>8.06</text:p>
          </table:table-cell>
          <table:table-cell table:style-name="ce255" table:formula="of:=+[.E96]" office:value-type="float" office:value="8.05889830508475" calcext:value-type="float">
            <text:p>8.06</text:p>
          </table:table-cell>
          <table:table-cell table:style-name="ce255" table:formula="of:=+[.F96]" office:value-type="float" office:value="8.05889830508475" calcext:value-type="float">
            <text:p>8.06</text:p>
          </table:table-cell>
          <table:table-cell table:style-name="ce255" table:formula="of:=+[.G96]" office:value-type="float" office:value="8.05889830508475" calcext:value-type="float">
            <text:p>8.06</text:p>
          </table:table-cell>
          <table:table-cell table:style-name="ce255" table:formula="of:=+[.H96]" office:value-type="float" office:value="8.05889830508475" calcext:value-type="float">
            <text:p>8.06</text:p>
          </table:table-cell>
          <table:table-cell table:style-name="ce255" table:formula="of:=+[.I96]" office:value-type="float" office:value="8.05889830508475" calcext:value-type="float">
            <text:p>8.06</text:p>
          </table:table-cell>
          <table:table-cell table:style-name="ce255" table:formula="of:=+[.J96]" office:value-type="float" office:value="8.05889830508475" calcext:value-type="float">
            <text:p>8.06</text:p>
          </table:table-cell>
          <table:table-cell table:style-name="ce255" table:formula="of:=+[.K96]" office:value-type="float" office:value="8.05889830508475" calcext:value-type="float">
            <text:p>8.06</text:p>
          </table:table-cell>
          <table:table-cell table:style-name="ce255" table:formula="of:=+[.L96]" office:value-type="float" office:value="8.05889830508475" calcext:value-type="float">
            <text:p>8.06</text:p>
          </table:table-cell>
          <table:table-cell table:style-name="ce255" table:formula="of:=+[.M96]" office:value-type="float" office:value="8.05889830508475" calcext:value-type="float">
            <text:p>8.06</text:p>
          </table:table-cell>
          <table:table-cell table:style-name="ce255" table:formula="of:=+[.N96]" office:value-type="float" office:value="8.05889830508475" calcext:value-type="float">
            <text:p>8.06</text:p>
          </table:table-cell>
          <table:table-cell table:style-name="ce255" table:formula="of:=+[.O96]" office:value-type="float" office:value="8.05889830508475" calcext:value-type="float">
            <text:p>8.06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valor de compra G90</text:p>
          </table:table-cell>
          <table:table-cell table:style-name="ce241"/>
          <table:table-cell table:style-name="ce255" table:formula="of:=+[.D97]" office:value-type="float" office:value="8.19576271186441" calcext:value-type="float">
            <text:p>8.20</text:p>
          </table:table-cell>
          <table:table-cell table:style-name="ce255" table:formula="of:=+[.E97]" office:value-type="float" office:value="8.19576271186441" calcext:value-type="float">
            <text:p>8.20</text:p>
          </table:table-cell>
          <table:table-cell table:style-name="ce255" table:formula="of:=+[.F97]" office:value-type="float" office:value="8.19576271186441" calcext:value-type="float">
            <text:p>8.20</text:p>
          </table:table-cell>
          <table:table-cell table:style-name="ce255" table:formula="of:=+[.G97]" office:value-type="float" office:value="8.19576271186441" calcext:value-type="float">
            <text:p>8.20</text:p>
          </table:table-cell>
          <table:table-cell table:style-name="ce255" table:formula="of:=+[.H97]" office:value-type="float" office:value="8.19576271186441" calcext:value-type="float">
            <text:p>8.20</text:p>
          </table:table-cell>
          <table:table-cell table:style-name="ce255" table:formula="of:=+[.I97]" office:value-type="float" office:value="8.19576271186441" calcext:value-type="float">
            <text:p>8.20</text:p>
          </table:table-cell>
          <table:table-cell table:style-name="ce255" table:formula="of:=+[.J97]" office:value-type="float" office:value="8.19576271186441" calcext:value-type="float">
            <text:p>8.20</text:p>
          </table:table-cell>
          <table:table-cell table:style-name="ce255" table:formula="of:=+[.K97]" office:value-type="float" office:value="8.19576271186441" calcext:value-type="float">
            <text:p>8.20</text:p>
          </table:table-cell>
          <table:table-cell table:style-name="ce255" table:formula="of:=+[.L97]" office:value-type="float" office:value="8.19576271186441" calcext:value-type="float">
            <text:p>8.20</text:p>
          </table:table-cell>
          <table:table-cell table:style-name="ce255" table:formula="of:=+[.M97]" office:value-type="float" office:value="8.19576271186441" calcext:value-type="float">
            <text:p>8.20</text:p>
          </table:table-cell>
          <table:table-cell table:style-name="ce255" table:formula="of:=+[.N97]" office:value-type="float" office:value="8.19576271186441" calcext:value-type="float">
            <text:p>8.20</text:p>
          </table:table-cell>
          <table:table-cell table:style-name="ce255" table:formula="of:=+[.O97]" office:value-type="float" office:value="8.19576271186441" calcext:value-type="float">
            <text:p>8.20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valor de compra G95</text:p>
          </table:table-cell>
          <table:table-cell table:style-name="ce241"/>
          <table:table-cell table:style-name="ce255" table:formula="of:=+[.D98]" office:value-type="float" office:value="8.45338983050847" calcext:value-type="float">
            <text:p>8.45</text:p>
          </table:table-cell>
          <table:table-cell table:style-name="ce255" table:formula="of:=+[.E98]" office:value-type="float" office:value="8.45338983050847" calcext:value-type="float">
            <text:p>8.45</text:p>
          </table:table-cell>
          <table:table-cell table:style-name="ce255" table:formula="of:=+[.F98]" office:value-type="float" office:value="8.45338983050847" calcext:value-type="float">
            <text:p>8.45</text:p>
          </table:table-cell>
          <table:table-cell table:style-name="ce255" table:formula="of:=+[.G98]" office:value-type="float" office:value="8.45338983050847" calcext:value-type="float">
            <text:p>8.45</text:p>
          </table:table-cell>
          <table:table-cell table:style-name="ce255" table:formula="of:=+[.H98]" office:value-type="float" office:value="8.45338983050847" calcext:value-type="float">
            <text:p>8.45</text:p>
          </table:table-cell>
          <table:table-cell table:style-name="ce255" table:formula="of:=+[.I98]" office:value-type="float" office:value="8.45338983050847" calcext:value-type="float">
            <text:p>8.45</text:p>
          </table:table-cell>
          <table:table-cell table:style-name="ce255" table:formula="of:=+[.J98]" office:value-type="float" office:value="8.45338983050847" calcext:value-type="float">
            <text:p>8.45</text:p>
          </table:table-cell>
          <table:table-cell table:style-name="ce255" table:formula="of:=+[.K98]" office:value-type="float" office:value="8.45338983050847" calcext:value-type="float">
            <text:p>8.45</text:p>
          </table:table-cell>
          <table:table-cell table:style-name="ce255" table:formula="of:=+[.L98]" office:value-type="float" office:value="8.45338983050847" calcext:value-type="float">
            <text:p>8.45</text:p>
          </table:table-cell>
          <table:table-cell table:style-name="ce255" table:formula="of:=+[.M98]" office:value-type="float" office:value="8.45338983050847" calcext:value-type="float">
            <text:p>8.45</text:p>
          </table:table-cell>
          <table:table-cell table:style-name="ce255" table:formula="of:=+[.N98]" office:value-type="float" office:value="8.45338983050847" calcext:value-type="float">
            <text:p>8.45</text:p>
          </table:table-cell>
          <table:table-cell table:style-name="ce255" table:formula="of:=+[.O98]" office:value-type="float" office:value="8.45338983050847" calcext:value-type="float">
            <text:p>8.45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Capital de Trabajo</text:p>
          </table:table-cell>
          <table:table-cell table:style-name="ce248"/>
          <table:table-cell table:style-name="ce256" table:formula="of:=+[.D105]*[.D108]+[.D106]*[.D109]+[.D107]*[.D110]" office:value-type="float" office:value="59374.0174080551" calcext:value-type="float">
            <text:p>59374.0</text:p>
          </table:table-cell>
          <table:table-cell table:style-name="ce256" table:formula="of:=+[.E105]*[.E108]+[.E106]*[.E109]+[.E107]*[.E110]" office:value-type="float" office:value="59939.9288852449" calcext:value-type="float">
            <text:p>59939.9</text:p>
          </table:table-cell>
          <table:table-cell table:style-name="ce256" table:formula="of:=+[.F105]*[.F108]+[.F106]*[.F109]+[.F107]*[.F110]" office:value-type="float" office:value="60788.7961010295" calcext:value-type="float">
            <text:p>60788.8</text:p>
          </table:table-cell>
          <table:table-cell table:style-name="ce256" table:formula="of:=+[.G105]*[.G108]+[.G106]*[.G109]+[.G107]*[.G110]" office:value-type="float" office:value="60812.1399494636" calcext:value-type="float">
            <text:p>60812.1</text:p>
          </table:table-cell>
          <table:table-cell table:style-name="ce256" table:formula="of:=+[.H105]*[.H108]+[.H106]*[.H109]+[.H107]*[.H110]" office:value-type="float" office:value="59967.9415033658" calcext:value-type="float">
            <text:p>59967.9</text:p>
          </table:table-cell>
          <table:table-cell table:style-name="ce256" table:formula="of:=+[.I105]*[.I108]+[.I106]*[.I109]+[.I107]*[.I110]" office:value-type="float" office:value="58975.2620334403" calcext:value-type="float">
            <text:p>58975.3</text:p>
          </table:table-cell>
          <table:table-cell table:style-name="ce256" table:formula="of:=+[.J105]*[.J108]+[.J106]*[.J109]+[.J107]*[.J110]" office:value-type="float" office:value="107523.180666052" calcext:value-type="float">
            <text:p>107523.2</text:p>
          </table:table-cell>
          <table:table-cell table:style-name="ce256" table:formula="of:=+[.K105]*[.K108]+[.K106]*[.K109]+[.K107]*[.K110]" office:value-type="float" office:value="63711.7288807146" calcext:value-type="float">
            <text:p>63711.7</text:p>
          </table:table-cell>
          <table:table-cell table:style-name="ce256" table:formula="of:=+[.L105]*[.L108]+[.L106]*[.L109]+[.L107]*[.L110]" office:value-type="float" office:value="64560.5960964992" calcext:value-type="float">
            <text:p>64560.6</text:p>
          </table:table-cell>
          <table:table-cell table:style-name="ce256" table:formula="of:=+[.M105]*[.M108]+[.M106]*[.M109]+[.M107]*[.M110]" office:value-type="float" office:value="64702.0739657966" calcext:value-type="float">
            <text:p>64702.1</text:p>
          </table:table-cell>
          <table:table-cell table:style-name="ce256" table:formula="of:=+[.N105]*[.N108]+[.N106]*[.N109]+[.N107]*[.N110]" office:value-type="float" office:value="70660.4851701927" calcext:value-type="float">
            <text:p>70660.5</text:p>
          </table:table-cell>
          <table:table-cell table:style-name="ce256" table:formula="of:=+[.O105]*[.O108]+[.O106]*[.O109]+[.O107]*[.O110]" office:value-type="float" office:value="113182.295437949" calcext:value-type="float">
            <text:p>113182.3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Variacion KW</text:p>
          </table:table-cell>
          <table:table-cell table:style-name="ce249" table:formula="of:=[.D111]-[.O99]" office:value-type="float" office:value="-46403.8287956356" calcext:value-type="float">
            <text:p>-46404</text:p>
          </table:table-cell>
          <table:table-cell table:style-name="ce248" table:formula="of:=+[.E111]-[.D111]" office:value-type="float" office:value="565.911477189766" calcext:value-type="float">
            <text:p>566</text:p>
          </table:table-cell>
          <table:table-cell table:style-name="ce248" table:formula="of:=+[.F111]-[.E111]" office:value-type="float" office:value="848.867215784609" calcext:value-type="float">
            <text:p>849</text:p>
          </table:table-cell>
          <table:table-cell table:style-name="ce248" table:formula="of:=+[.G111]-[.F111]" office:value-type="float" office:value="23.3438484340586" calcext:value-type="float">
            <text:p>23</text:p>
          </table:table-cell>
          <table:table-cell table:style-name="ce248" table:formula="of:=+[.H111]-[.G111]" office:value-type="float" office:value="-844.198446097798" calcext:value-type="float">
            <text:p>-844</text:p>
          </table:table-cell>
          <table:table-cell table:style-name="ce248" table:formula="of:=+[.I111]-[.H111]" office:value-type="float" office:value="-992.679469925468" calcext:value-type="float">
            <text:p>-993</text:p>
          </table:table-cell>
          <table:table-cell table:style-name="ce248" table:formula="of:=+[.J111]-[.I111]" office:value-type="float" office:value="48547.9186326114" calcext:value-type="float">
            <text:p>48548</text:p>
          </table:table-cell>
          <table:table-cell table:style-name="ce248" table:formula="of:=+[.K111]-[.J111]" office:value-type="float" office:value="-43811.4517853371" calcext:value-type="float">
            <text:p>-43811</text:p>
          </table:table-cell>
          <table:table-cell table:style-name="ce248" table:formula="of:=+[.L111]-[.K111]" office:value-type="float" office:value="848.867215784609" calcext:value-type="float">
            <text:p>849</text:p>
          </table:table-cell>
          <table:table-cell table:style-name="ce248" table:formula="of:=+[.M111]-[.L111]" office:value-type="float" office:value="141.477869297407" calcext:value-type="float">
            <text:p>141</text:p>
          </table:table-cell>
          <table:table-cell table:style-name="ce248" table:formula="of:=+[.N111]-[.M111]" office:value-type="float" office:value="5958.41120439614" calcext:value-type="float">
            <text:p>5958</text:p>
          </table:table-cell>
          <table:table-cell table:style-name="ce248" table:formula="of:=+[.O111]-[.N111]" office:value-type="float" office:value="42521.8102677564" calcext:value-type="float">
            <text:p>42522</text:p>
          </table:table-cell>
          <table:table-cell table:style-name="ce248"/>
          <table:table-cell table:style-name="ce261" table:formula="of:=SUM([.C112:.O112])" office:value-type="float" office:value="7404.44923425835" calcext:value-type="float">
            <text:p>7404</text:p>
          </table:table-cell>
          <table:table-cell office:value-type="float" office:value="9" calcext:value-type="float">
            <text:p>9</text:p>
          </table:table-cell>
          <table:table-cell table:number-columns-repeated="16367"/>
        </table:table-row>
        <table:table-row table:style-name="ro9">
          <table:table-cell/>
          <table:table-cell table:style-name="ce242" office:value-type="string" calcext:value-type="string">
            <text:p>TOTAL</text:p>
          </table:table-cell>
          <table:table-cell table:style-name="ce241"/>
          <table:table-cell table:style-name="ce248" table:formula="of:=SUM([.D111:.D112])" office:value-type="float" office:value="59939.9288852449" calcext:value-type="float">
            <text:p>59940</text:p>
          </table:table-cell>
          <table:table-cell table:style-name="ce248" table:formula="of:=SUM([.E111:.E112])" office:value-type="float" office:value="60788.7961010295" calcext:value-type="float">
            <text:p>60789</text:p>
          </table:table-cell>
          <table:table-cell table:style-name="ce248" table:formula="of:=SUM([.F111:.F112])" office:value-type="float" office:value="60812.1399494636" calcext:value-type="float">
            <text:p>60812</text:p>
          </table:table-cell>
          <table:table-cell table:style-name="ce248" table:formula="of:=SUM([.G111:.G112])" office:value-type="float" office:value="59967.9415033658" calcext:value-type="float">
            <text:p>59968</text:p>
          </table:table-cell>
          <table:table-cell table:style-name="ce248" table:formula="of:=SUM([.H111:.H112])" office:value-type="float" office:value="58975.2620334403" calcext:value-type="float">
            <text:p>58975</text:p>
          </table:table-cell>
          <table:table-cell table:style-name="ce248" table:formula="of:=SUM([.I111:.I112])" office:value-type="float" office:value="107523.180666052" calcext:value-type="float">
            <text:p>107523</text:p>
          </table:table-cell>
          <table:table-cell table:style-name="ce248" table:formula="of:=SUM([.J111:.J112])" office:value-type="float" office:value="63711.7288807146" calcext:value-type="float">
            <text:p>63712</text:p>
          </table:table-cell>
          <table:table-cell table:style-name="ce248" table:formula="of:=SUM([.K111:.K112])" office:value-type="float" office:value="64560.5960964992" calcext:value-type="float">
            <text:p>64561</text:p>
          </table:table-cell>
          <table:table-cell table:style-name="ce248" table:formula="of:=SUM([.L111:.L112])" office:value-type="float" office:value="64702.0739657966" calcext:value-type="float">
            <text:p>64702</text:p>
          </table:table-cell>
          <table:table-cell table:style-name="ce248" table:formula="of:=SUM([.M111:.M112])" office:value-type="float" office:value="70660.4851701927" calcext:value-type="float">
            <text:p>70660</text:p>
          </table:table-cell>
          <table:table-cell table:style-name="ce248" table:formula="of:=SUM([.N111:.N112])" office:value-type="float" office:value="113182.295437949" calcext:value-type="float">
            <text:p>113182</text:p>
          </table:table-cell>
          <table:table-cell table:style-name="ce248" table:formula="of:=SUM([.O111:.O112])" office:value-type="float" office:value="113182.295437949" calcext:value-type="float">
            <text:p>113182</text:p>
          </table:table-cell>
          <table:table-cell table:style-name="ce246"/>
          <table:table-cell table:number-columns-repeated="16368"/>
        </table:table-row>
        <table:table-row table:style-name="ro9">
          <table:table-cell table:number-columns-repeated="16384"/>
        </table:table-row>
        <table:table-row table:style-name="ro9">
          <table:table-cell/>
          <table:table-cell table:style-name="ce239" office:value-type="string" calcext:value-type="string" table:number-columns-spanned="1" table:number-rows-spanned="2">
            <text:p>RUBRO</text:p>
          </table:table-cell>
          <table:table-cell table:style-name="ce239" office:value-type="float" office:value="9" calcext:value-type="float" table:number-columns-spanned="1" table:number-rows-spanned="2">
            <text:p>9</text:p>
          </table:table-cell>
          <table:table-cell table:style-name="ce239" office:value-type="string" calcext:value-type="string" table:number-columns-spanned="12" table:number-rows-spanned="1">
            <text:p>AÑO 10</text:p>
          </table:table-cell>
          <table:covered-table-cell table:number-columns-repeated="11" table:style-name="ce240"/>
          <table:table-cell table:style-name="ce259" office:value-type="string" calcext:value-type="string">
            <text:p>Total</text:p>
          </table:table-cell>
          <table:table-cell table:number-columns-repeated="16368"/>
        </table:table-row>
        <table:table-row table:style-name="ro9">
          <table:table-cell/>
          <table:covered-table-cell table:number-columns-repeated="2" table:style-name="ce240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62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DIESEL B5</text:p>
          </table:table-cell>
          <table:table-cell table:style-name="ce241"/>
          <table:table-cell table:style-name="ce254" table:formula="of:=+[$'Presupuesto de ventas'.C22]/2" office:value-type="float" office:value="3927.40301791973" calcext:value-type="float">
            <text:p>3,927</text:p>
          </table:table-cell>
          <table:table-cell table:style-name="ce254" table:formula="of:=+[$'Presupuesto de ventas'.D22]/2" office:value-type="float" office:value="3964.836268025" calcext:value-type="float">
            <text:p>3,965</text:p>
          </table:table-cell>
          <table:table-cell table:style-name="ce254" table:formula="of:=+[$'Presupuesto de ventas'.E22]/2" office:value-type="float" office:value="4020.98614318291" calcext:value-type="float">
            <text:p>4,021</text:p>
          </table:table-cell>
          <table:table-cell table:style-name="ce254" table:formula="of:=+[$'Presupuesto de ventas'.F22]/2" office:value-type="float" office:value="4022.53026474975" calcext:value-type="float">
            <text:p>4,023</text:p>
          </table:table-cell>
          <table:table-cell table:style-name="ce254" table:formula="of:=+[$'Presupuesto de ventas'.G22]/2" office:value-type="float" office:value="3966.68921390521" calcext:value-type="float">
            <text:p>3,967</text:p>
          </table:table-cell>
          <table:table-cell table:style-name="ce254" table:formula="of:=+[$'Presupuesto de ventas'.H22]/2" office:value-type="float" office:value="3901.0266140643" calcext:value-type="float">
            <text:p>3,901</text:p>
          </table:table-cell>
          <table:table-cell table:style-name="ce254" table:formula="of:=+[$'Presupuesto de ventas'.I22]/2" office:value-type="float" office:value="7112.31752000142" calcext:value-type="float">
            <text:p>7,112</text:p>
          </table:table-cell>
          <table:table-cell table:style-name="ce254" table:formula="of:=+[$'Presupuesto de ventas'.J22]/2" office:value-type="float" office:value="4214.32887997663" calcext:value-type="float">
            <text:p>4,214</text:p>
          </table:table-cell>
          <table:table-cell table:style-name="ce254" table:formula="of:=+[$'Presupuesto de ventas'.K22]/2" office:value-type="float" office:value="4270.47875513453" calcext:value-type="float">
            <text:p>4,270</text:p>
          </table:table-cell>
          <table:table-cell table:style-name="ce254" table:formula="of:=+[$'Presupuesto de ventas'.L22]/2" office:value-type="float" office:value="4279.83706766085" calcext:value-type="float">
            <text:p>4,280</text:p>
          </table:table-cell>
          <table:table-cell table:style-name="ce254" table:formula="of:=+[$'Presupuesto de ventas'.M22]/2" office:value-type="float" office:value="4673.96707886298" calcext:value-type="float">
            <text:p>4,674</text:p>
          </table:table-cell>
          <table:table-cell table:style-name="ce254" table:formula="of:=+[$'Presupuesto de ventas'.N22]/2" office:value-type="float" office:value="7486.65002105412" calcext:value-type="float">
            <text:p>7,487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GASOGHOL 90</text:p>
          </table:table-cell>
          <table:table-cell table:style-name="ce241"/>
          <table:table-cell table:style-name="ce254" table:formula="of:=+[$'Presupuesto de ventas'.C37]/2" office:value-type="float" office:value="3141.92241433578" calcext:value-type="float">
            <text:p>3,142</text:p>
          </table:table-cell>
          <table:table-cell table:style-name="ce254" table:formula="of:=+[$'Presupuesto de ventas'.D37]/2" office:value-type="float" office:value="3171.86901442" calcext:value-type="float">
            <text:p>3,172</text:p>
          </table:table-cell>
          <table:table-cell table:style-name="ce254" table:formula="of:=+[$'Presupuesto de ventas'.E37]/2" office:value-type="float" office:value="3216.78891454632" calcext:value-type="float">
            <text:p>3,217</text:p>
          </table:table-cell>
          <table:table-cell table:style-name="ce254" table:formula="of:=+[$'Presupuesto de ventas'.F37]/2" office:value-type="float" office:value="3218.0242117998" calcext:value-type="float">
            <text:p>3,218</text:p>
          </table:table-cell>
          <table:table-cell table:style-name="ce254" table:formula="of:=+[$'Presupuesto de ventas'.G37]/2" office:value-type="float" office:value="3173.35137112417" calcext:value-type="float">
            <text:p>3,173</text:p>
          </table:table-cell>
          <table:table-cell table:style-name="ce254" table:formula="of:=+[$'Presupuesto de ventas'.H37]/2" office:value-type="float" office:value="3120.82129125144" calcext:value-type="float">
            <text:p>3,121</text:p>
          </table:table-cell>
          <table:table-cell table:style-name="ce254" table:formula="of:=+[$'Presupuesto de ventas'.I37]/2" office:value-type="float" office:value="5689.85401600113" calcext:value-type="float">
            <text:p>5,690</text:p>
          </table:table-cell>
          <table:table-cell table:style-name="ce254" table:formula="of:=+[$'Presupuesto de ventas'.J37]/2" office:value-type="float" office:value="3371.4631039813" calcext:value-type="float">
            <text:p>3,371</text:p>
          </table:table-cell>
          <table:table-cell table:style-name="ce254" table:formula="of:=+[$'Presupuesto de ventas'.K37]/2" office:value-type="float" office:value="3416.38300410763" calcext:value-type="float">
            <text:p>3,416</text:p>
          </table:table-cell>
          <table:table-cell table:style-name="ce254" table:formula="of:=+[$'Presupuesto de ventas'.L37]/2" office:value-type="float" office:value="3423.86965412868" calcext:value-type="float">
            <text:p>3,424</text:p>
          </table:table-cell>
          <table:table-cell table:style-name="ce254" table:formula="of:=+[$'Presupuesto de ventas'.M37]/2" office:value-type="float" office:value="3739.17366309038" calcext:value-type="float">
            <text:p>3,739</text:p>
          </table:table-cell>
          <table:table-cell table:style-name="ce254" table:formula="of:=+[$'Presupuesto de ventas'.N37]/2" office:value-type="float" office:value="5989.3200168433" calcext:value-type="float">
            <text:p>5,989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GASOHOL 95</text:p>
          </table:table-cell>
          <table:table-cell table:style-name="ce241"/>
          <table:table-cell table:style-name="ce254" table:formula="of:=+[$'Presupuesto de ventas'.C52]/2" office:value-type="float" office:value="725.059018692873" calcext:value-type="float">
            <text:p>725</text:p>
          </table:table-cell>
          <table:table-cell table:style-name="ce254" table:formula="of:=+[$'Presupuesto de ventas'.D52]/2" office:value-type="float" office:value="731.969772558462" calcext:value-type="float">
            <text:p>732</text:p>
          </table:table-cell>
          <table:table-cell table:style-name="ce254" table:formula="of:=+[$'Presupuesto de ventas'.E52]/2" office:value-type="float" office:value="742.335903356844" calcext:value-type="float">
            <text:p>742</text:p>
          </table:table-cell>
          <table:table-cell table:style-name="ce254" table:formula="of:=+[$'Presupuesto de ventas'.F52]/2" office:value-type="float" office:value="742.620971953799" calcext:value-type="float">
            <text:p>743</text:p>
          </table:table-cell>
          <table:table-cell table:style-name="ce254" table:formula="of:=+[$'Presupuesto de ventas'.G52]/2" office:value-type="float" office:value="732.311854874808" calcext:value-type="float">
            <text:p>732</text:p>
          </table:table-cell>
          <table:table-cell table:style-name="ce254" table:formula="of:=+[$'Presupuesto de ventas'.H52]/2" office:value-type="float" office:value="720.189528750333" calcext:value-type="float">
            <text:p>720</text:p>
          </table:table-cell>
          <table:table-cell table:style-name="ce254" table:formula="of:=+[$'Presupuesto de ventas'.I52]/2" office:value-type="float" office:value="1313.0432344618" calcext:value-type="float">
            <text:p>1,313</text:p>
          </table:table-cell>
          <table:table-cell table:style-name="ce254" table:formula="of:=+[$'Presupuesto de ventas'.J52]/2" office:value-type="float" office:value="778.029947072609" calcext:value-type="float">
            <text:p>778</text:p>
          </table:table-cell>
          <table:table-cell table:style-name="ce254" table:formula="of:=+[$'Presupuesto de ventas'.K52]/2" office:value-type="float" office:value="788.396077870991" calcext:value-type="float">
            <text:p>788</text:p>
          </table:table-cell>
          <table:table-cell table:style-name="ce254" table:formula="of:=+[$'Presupuesto de ventas'.L52]/2" office:value-type="float" office:value="790.123766337388" calcext:value-type="float">
            <text:p>790</text:p>
          </table:table-cell>
          <table:table-cell table:style-name="ce254" table:formula="of:=+[$'Presupuesto de ventas'.M52]/2" office:value-type="float" office:value="862.886229943934" calcext:value-type="float">
            <text:p>863</text:p>
          </table:table-cell>
          <table:table-cell table:style-name="ce254" table:formula="of:=+[$'Presupuesto de ventas'.N52]/2" office:value-type="float" office:value="1382.15077311768" calcext:value-type="float">
            <text:p>1,382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valor de compra DB5</text:p>
          </table:table-cell>
          <table:table-cell table:style-name="ce241"/>
          <table:table-cell table:style-name="ce255" table:formula="of:=+[.D108]" office:value-type="float" office:value="8.05889830508475" calcext:value-type="float">
            <text:p>8.06</text:p>
          </table:table-cell>
          <table:table-cell table:style-name="ce255" table:formula="of:=+[.E108]" office:value-type="float" office:value="8.05889830508475" calcext:value-type="float">
            <text:p>8.06</text:p>
          </table:table-cell>
          <table:table-cell table:style-name="ce255" table:formula="of:=+[.F108]" office:value-type="float" office:value="8.05889830508475" calcext:value-type="float">
            <text:p>8.06</text:p>
          </table:table-cell>
          <table:table-cell table:style-name="ce255" table:formula="of:=+[.G108]" office:value-type="float" office:value="8.05889830508475" calcext:value-type="float">
            <text:p>8.06</text:p>
          </table:table-cell>
          <table:table-cell table:style-name="ce255" table:formula="of:=+[.H108]" office:value-type="float" office:value="8.05889830508475" calcext:value-type="float">
            <text:p>8.06</text:p>
          </table:table-cell>
          <table:table-cell table:style-name="ce255" table:formula="of:=+[.I108]" office:value-type="float" office:value="8.05889830508475" calcext:value-type="float">
            <text:p>8.06</text:p>
          </table:table-cell>
          <table:table-cell table:style-name="ce255" table:formula="of:=+[.J108]" office:value-type="float" office:value="8.05889830508475" calcext:value-type="float">
            <text:p>8.06</text:p>
          </table:table-cell>
          <table:table-cell table:style-name="ce255" table:formula="of:=+[.K108]" office:value-type="float" office:value="8.05889830508475" calcext:value-type="float">
            <text:p>8.06</text:p>
          </table:table-cell>
          <table:table-cell table:style-name="ce255" table:formula="of:=+[.L108]" office:value-type="float" office:value="8.05889830508475" calcext:value-type="float">
            <text:p>8.06</text:p>
          </table:table-cell>
          <table:table-cell table:style-name="ce255" table:formula="of:=+[.M108]" office:value-type="float" office:value="8.05889830508475" calcext:value-type="float">
            <text:p>8.06</text:p>
          </table:table-cell>
          <table:table-cell table:style-name="ce255" table:formula="of:=+[.N108]" office:value-type="float" office:value="8.05889830508475" calcext:value-type="float">
            <text:p>8.06</text:p>
          </table:table-cell>
          <table:table-cell table:style-name="ce255" table:formula="of:=+[.O108]" office:value-type="float" office:value="8.05889830508475" calcext:value-type="float">
            <text:p>8.06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valor de compra G90</text:p>
          </table:table-cell>
          <table:table-cell table:style-name="ce241"/>
          <table:table-cell table:style-name="ce255" table:formula="of:=+[.D109]" office:value-type="float" office:value="8.19576271186441" calcext:value-type="float">
            <text:p>8.20</text:p>
          </table:table-cell>
          <table:table-cell table:style-name="ce255" table:formula="of:=+[.E109]" office:value-type="float" office:value="8.19576271186441" calcext:value-type="float">
            <text:p>8.20</text:p>
          </table:table-cell>
          <table:table-cell table:style-name="ce255" table:formula="of:=+[.F109]" office:value-type="float" office:value="8.19576271186441" calcext:value-type="float">
            <text:p>8.20</text:p>
          </table:table-cell>
          <table:table-cell table:style-name="ce255" table:formula="of:=+[.G109]" office:value-type="float" office:value="8.19576271186441" calcext:value-type="float">
            <text:p>8.20</text:p>
          </table:table-cell>
          <table:table-cell table:style-name="ce255" table:formula="of:=+[.H109]" office:value-type="float" office:value="8.19576271186441" calcext:value-type="float">
            <text:p>8.20</text:p>
          </table:table-cell>
          <table:table-cell table:style-name="ce255" table:formula="of:=+[.I109]" office:value-type="float" office:value="8.19576271186441" calcext:value-type="float">
            <text:p>8.20</text:p>
          </table:table-cell>
          <table:table-cell table:style-name="ce255" table:formula="of:=+[.J109]" office:value-type="float" office:value="8.19576271186441" calcext:value-type="float">
            <text:p>8.20</text:p>
          </table:table-cell>
          <table:table-cell table:style-name="ce255" table:formula="of:=+[.K109]" office:value-type="float" office:value="8.19576271186441" calcext:value-type="float">
            <text:p>8.20</text:p>
          </table:table-cell>
          <table:table-cell table:style-name="ce255" table:formula="of:=+[.L109]" office:value-type="float" office:value="8.19576271186441" calcext:value-type="float">
            <text:p>8.20</text:p>
          </table:table-cell>
          <table:table-cell table:style-name="ce255" table:formula="of:=+[.M109]" office:value-type="float" office:value="8.19576271186441" calcext:value-type="float">
            <text:p>8.20</text:p>
          </table:table-cell>
          <table:table-cell table:style-name="ce255" table:formula="of:=+[.N109]" office:value-type="float" office:value="8.19576271186441" calcext:value-type="float">
            <text:p>8.20</text:p>
          </table:table-cell>
          <table:table-cell table:style-name="ce255" table:formula="of:=+[.O109]" office:value-type="float" office:value="8.19576271186441" calcext:value-type="float">
            <text:p>8.20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valor de compra G95</text:p>
          </table:table-cell>
          <table:table-cell table:style-name="ce241"/>
          <table:table-cell table:style-name="ce255" table:formula="of:=+[.D110]" office:value-type="float" office:value="8.45338983050847" calcext:value-type="float">
            <text:p>8.45</text:p>
          </table:table-cell>
          <table:table-cell table:style-name="ce255" table:formula="of:=+[.E110]" office:value-type="float" office:value="8.45338983050847" calcext:value-type="float">
            <text:p>8.45</text:p>
          </table:table-cell>
          <table:table-cell table:style-name="ce255" table:formula="of:=+[.F110]" office:value-type="float" office:value="8.45338983050847" calcext:value-type="float">
            <text:p>8.45</text:p>
          </table:table-cell>
          <table:table-cell table:style-name="ce255" table:formula="of:=+[.G110]" office:value-type="float" office:value="8.45338983050847" calcext:value-type="float">
            <text:p>8.45</text:p>
          </table:table-cell>
          <table:table-cell table:style-name="ce255" table:formula="of:=+[.H110]" office:value-type="float" office:value="8.45338983050847" calcext:value-type="float">
            <text:p>8.45</text:p>
          </table:table-cell>
          <table:table-cell table:style-name="ce255" table:formula="of:=+[.I110]" office:value-type="float" office:value="8.45338983050847" calcext:value-type="float">
            <text:p>8.45</text:p>
          </table:table-cell>
          <table:table-cell table:style-name="ce255" table:formula="of:=+[.J110]" office:value-type="float" office:value="8.45338983050847" calcext:value-type="float">
            <text:p>8.45</text:p>
          </table:table-cell>
          <table:table-cell table:style-name="ce255" table:formula="of:=+[.K110]" office:value-type="float" office:value="8.45338983050847" calcext:value-type="float">
            <text:p>8.45</text:p>
          </table:table-cell>
          <table:table-cell table:style-name="ce255" table:formula="of:=+[.L110]" office:value-type="float" office:value="8.45338983050847" calcext:value-type="float">
            <text:p>8.45</text:p>
          </table:table-cell>
          <table:table-cell table:style-name="ce255" table:formula="of:=+[.M110]" office:value-type="float" office:value="8.45338983050847" calcext:value-type="float">
            <text:p>8.45</text:p>
          </table:table-cell>
          <table:table-cell table:style-name="ce255" table:formula="of:=+[.N110]" office:value-type="float" office:value="8.45338983050847" calcext:value-type="float">
            <text:p>8.45</text:p>
          </table:table-cell>
          <table:table-cell table:style-name="ce255" table:formula="of:=+[.O110]" office:value-type="float" office:value="8.45338983050847" calcext:value-type="float">
            <text:p>8.45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Capital de Trabajo</text:p>
          </table:table-cell>
          <table:table-cell table:style-name="ce248"/>
          <table:table-cell table:style-name="ce248" table:formula="of:=+[.D117]*[.D120]+[.D118]*[.D121]+[.D119]*[.D122]" office:value-type="float" office:value="63530.198626619" calcext:value-type="float">
            <text:p>63530</text:p>
          </table:table-cell>
          <table:table-cell table:style-name="ce248" table:formula="of:=+[.E117]*[.E120]+[.E118]*[.E121]+[.E119]*[.E122]" office:value-type="float" office:value="64135.7239072121" calcext:value-type="float">
            <text:p>64136</text:p>
          </table:table-cell>
          <table:table-cell table:style-name="ce248" table:formula="of:=+[.F117]*[.F120]+[.F118]*[.F121]+[.F119]*[.F122]" office:value-type="float" office:value="65044.0118281016" calcext:value-type="float">
            <text:p>65044</text:p>
          </table:table-cell>
          <table:table-cell table:style-name="ce248" table:formula="of:=+[.G117]*[.G120]+[.G118]*[.G121]+[.G119]*[.G122]" office:value-type="float" office:value="65068.989745926" calcext:value-type="float">
            <text:p>65069</text:p>
          </table:table-cell>
          <table:table-cell table:style-name="ce248" table:formula="of:=+[.H117]*[.H120]+[.H118]*[.H121]+[.H119]*[.H122]" office:value-type="float" office:value="64165.6974086014" calcext:value-type="float">
            <text:p>64166</text:p>
          </table:table-cell>
          <table:table-cell table:style-name="ce248" table:formula="of:=+[.I117]*[.I120]+[.I118]*[.I121]+[.I119]*[.I122]" office:value-type="float" office:value="63103.5303757811" calcext:value-type="float">
            <text:p>63104</text:p>
          </table:table-cell>
          <table:table-cell table:style-name="ce248" table:formula="of:=+[.J117]*[.J120]+[.J118]*[.J121]+[.J119]*[.J122]" office:value-type="float" office:value="115049.803312675" calcext:value-type="float">
            <text:p>115050</text:p>
          </table:table-cell>
          <table:table-cell table:style-name="ce248" table:formula="of:=+[.K117]*[.K120]+[.K118]*[.K121]+[.K119]*[.K122]" office:value-type="float" office:value="68171.5499023646" calcext:value-type="float">
            <text:p>68172</text:p>
          </table:table-cell>
          <table:table-cell table:style-name="ce248" table:formula="of:=+[.L117]*[.L120]+[.L118]*[.L121]+[.L119]*[.L122]" office:value-type="float" office:value="69079.8378232541" calcext:value-type="float">
            <text:p>69080</text:p>
          </table:table-cell>
          <table:table-cell table:style-name="ce248" table:formula="of:=+[.M117]*[.M120]+[.M118]*[.M121]+[.M119]*[.M122]" office:value-type="float" office:value="69231.2191434024" calcext:value-type="float">
            <text:p>69231</text:p>
          </table:table-cell>
          <table:table-cell table:style-name="ce248" table:formula="of:=+[.N117]*[.N120]+[.N118]*[.N121]+[.N119]*[.N122]" office:value-type="float" office:value="75606.7191321062" calcext:value-type="float">
            <text:p>75607</text:p>
          </table:table-cell>
          <table:table-cell table:style-name="ce248" table:formula="of:=+[.O117]*[.O120]+[.O118]*[.O121]+[.O119]*[.O122]" office:value-type="float" office:value="121105.056118606" calcext:value-type="float">
            <text:p>121105</text:p>
          </table:table-cell>
          <table:table-cell table:style-name="ce246"/>
          <table:table-cell table:number-columns-repeated="16368"/>
        </table:table-row>
        <table:table-row table:style-name="ro9">
          <table:table-cell/>
          <table:table-cell table:style-name="ce241" office:value-type="string" calcext:value-type="string">
            <text:p>Variacion KW</text:p>
          </table:table-cell>
          <table:table-cell table:style-name="ce251" table:formula="of:=[.D123]-[.O111]" office:value-type="float" office:value="-49652.0968113301" calcext:value-type="float">
            <text:p>-49652.1</text:p>
          </table:table-cell>
          <table:table-cell table:style-name="ce248" table:formula="of:=+[.E123]-[.D123]" office:value-type="float" office:value="605.525280593043" calcext:value-type="float">
            <text:p>606</text:p>
          </table:table-cell>
          <table:table-cell table:style-name="ce248" table:formula="of:=+[.F123]-[.E123]" office:value-type="float" office:value="908.287920889532" calcext:value-type="float">
            <text:p>908</text:p>
          </table:table-cell>
          <table:table-cell table:style-name="ce248" table:formula="of:=+[.G123]-[.F123]" office:value-type="float" office:value="24.9779178244571" calcext:value-type="float">
            <text:p>25</text:p>
          </table:table-cell>
          <table:table-cell table:style-name="ce248" table:formula="of:=+[.H123]-[.G123]" office:value-type="float" office:value="-903.292337324652" calcext:value-type="float">
            <text:p>-903</text:p>
          </table:table-cell>
          <table:table-cell table:style-name="ce248" table:formula="of:=+[.I123]-[.H123]" office:value-type="float" office:value="-1062.16703282025" calcext:value-type="float">
            <text:p>-1062</text:p>
          </table:table-cell>
          <table:table-cell table:style-name="ce248" table:formula="of:=+[.J123]-[.I123]" office:value-type="float" office:value="51946.2729368942" calcext:value-type="float">
            <text:p>51946</text:p>
          </table:table-cell>
          <table:table-cell table:style-name="ce248" table:formula="of:=+[.K123]-[.J123]" office:value-type="float" office:value="-46878.2534103107" calcext:value-type="float">
            <text:p>-46878</text:p>
          </table:table-cell>
          <table:table-cell table:style-name="ce248" table:formula="of:=+[.L123]-[.K123]" office:value-type="float" office:value="908.287920889517" calcext:value-type="float">
            <text:p>908</text:p>
          </table:table-cell>
          <table:table-cell table:style-name="ce248" table:formula="of:=+[.M123]-[.L123]" office:value-type="float" office:value="151.381320148241" calcext:value-type="float">
            <text:p>151</text:p>
          </table:table-cell>
          <table:table-cell table:style-name="ce248" table:formula="of:=+[.N123]-[.M123]" office:value-type="float" office:value="6375.49998870386" calcext:value-type="float">
            <text:p>6375</text:p>
          </table:table-cell>
          <table:table-cell table:style-name="ce248" table:formula="of:=+[.O123]-[.N123]" office:value-type="float" office:value="45498.3369864994" calcext:value-type="float">
            <text:p>45498</text:p>
          </table:table-cell>
          <table:table-cell table:style-name="ce248"/>
          <table:table-cell table:style-name="ce261" table:formula="of:=SUM([.C124:.O124])" office:value-type="float" office:value="7922.76068065644" calcext:value-type="float">
            <text:p>7923</text:p>
          </table:table-cell>
          <table:table-cell office:value-type="float" office:value="10" calcext:value-type="float">
            <text:p>10</text:p>
          </table:table-cell>
          <table:table-cell table:number-columns-repeated="16367"/>
        </table:table-row>
        <table:table-row table:style-name="ro9">
          <table:table-cell/>
          <table:table-cell table:style-name="ce242" office:value-type="string" calcext:value-type="string">
            <text:p>TOTAL</text:p>
          </table:table-cell>
          <table:table-cell table:style-name="ce241"/>
          <table:table-cell table:style-name="ce248" table:formula="of:=SUM([.D123:.D124])" office:value-type="float" office:value="64135.7239072121" calcext:value-type="float">
            <text:p>64136</text:p>
          </table:table-cell>
          <table:table-cell table:style-name="ce248" table:formula="of:=SUM([.E123:.E124])" office:value-type="float" office:value="65044.0118281016" calcext:value-type="float">
            <text:p>65044</text:p>
          </table:table-cell>
          <table:table-cell table:style-name="ce248" table:formula="of:=SUM([.F123:.F124])" office:value-type="float" office:value="65068.989745926" calcext:value-type="float">
            <text:p>65069</text:p>
          </table:table-cell>
          <table:table-cell table:style-name="ce248" table:formula="of:=SUM([.G123:.G124])" office:value-type="float" office:value="64165.6974086014" calcext:value-type="float">
            <text:p>64166</text:p>
          </table:table-cell>
          <table:table-cell table:style-name="ce248" table:formula="of:=SUM([.H123:.H124])" office:value-type="float" office:value="63103.5303757811" calcext:value-type="float">
            <text:p>63104</text:p>
          </table:table-cell>
          <table:table-cell table:style-name="ce248" table:formula="of:=SUM([.I123:.I124])" office:value-type="float" office:value="115049.803312675" calcext:value-type="float">
            <text:p>115050</text:p>
          </table:table-cell>
          <table:table-cell table:style-name="ce248" table:formula="of:=SUM([.J123:.J124])" office:value-type="float" office:value="68171.5499023646" calcext:value-type="float">
            <text:p>68172</text:p>
          </table:table-cell>
          <table:table-cell table:style-name="ce248" table:formula="of:=SUM([.K123:.K124])" office:value-type="float" office:value="69079.8378232541" calcext:value-type="float">
            <text:p>69080</text:p>
          </table:table-cell>
          <table:table-cell table:style-name="ce248" table:formula="of:=SUM([.L123:.L124])" office:value-type="float" office:value="69231.2191434024" calcext:value-type="float">
            <text:p>69231</text:p>
          </table:table-cell>
          <table:table-cell table:style-name="ce248" table:formula="of:=SUM([.M123:.M124])" office:value-type="float" office:value="75606.7191321062" calcext:value-type="float">
            <text:p>75607</text:p>
          </table:table-cell>
          <table:table-cell table:style-name="ce248" table:formula="of:=SUM([.N123:.N124])" office:value-type="float" office:value="121105.056118606" calcext:value-type="float">
            <text:p>121105</text:p>
          </table:table-cell>
          <table:table-cell table:style-name="ce248" table:formula="of:=SUM([.O123:.O124])" office:value-type="float" office:value="121105.056118606" calcext:value-type="float">
            <text:p>121105</text:p>
          </table:table-cell>
          <table:table-cell table:style-name="ce246"/>
          <table:table-cell table:number-columns-repeated="16368"/>
        </table:table-row>
        <table:table-row table:style-name="ro9" table:number-rows-repeated="2">
          <table:table-cell table:number-columns-repeated="16384"/>
        </table:table-row>
        <table:table-row table:style-name="ro9">
          <table:table-cell/>
          <table:table-cell table:style-name="ce243" office:value-type="string" calcext:value-type="string" table:number-columns-spanned="13" table:number-rows-spanned="1">
            <text:p>CAPITAL DE TRABAJO ANUAL</text:p>
          </table:table-cell>
          <table:covered-table-cell table:number-columns-repeated="12" table:style-name="ce243"/>
          <table:table-cell table:number-columns-repeated="16370"/>
        </table:table-row>
        <table:table-row table:style-name="ro9">
          <table:table-cell/>
          <table:table-cell table:style-name="ce244" table:number-columns-repeated="13"/>
          <table:table-cell table:number-columns-repeated="16370"/>
        </table:table-row>
        <table:table-row table:style-name="ro9">
          <table:table-cell/>
          <table:table-cell table:style-name="ce245"/>
          <table:table-cell table:style-name="ce245" office:value-type="float" office:value="0" calcext:value-type="float">
            <text:p>0</text:p>
          </table:table-cell>
          <table:table-cell table:style-name="ce245" office:value-type="float" office:value="1" calcext:value-type="float">
            <text:p>1</text:p>
          </table:table-cell>
          <table:table-cell table:style-name="ce245" office:value-type="float" office:value="2" calcext:value-type="float">
            <text:p>2</text:p>
          </table:table-cell>
          <table:table-cell table:style-name="ce245" office:value-type="float" office:value="3" calcext:value-type="float">
            <text:p>3</text:p>
          </table:table-cell>
          <table:table-cell table:style-name="ce245" office:value-type="float" office:value="4" calcext:value-type="float">
            <text:p>4</text:p>
          </table:table-cell>
          <table:table-cell table:style-name="ce245" office:value-type="float" office:value="5" calcext:value-type="float">
            <text:p>5</text:p>
          </table:table-cell>
          <table:table-cell table:style-name="ce245" office:value-type="float" office:value="6" calcext:value-type="float">
            <text:p>6</text:p>
          </table:table-cell>
          <table:table-cell table:style-name="ce245" office:value-type="float" office:value="7" calcext:value-type="float">
            <text:p>7</text:p>
          </table:table-cell>
          <table:table-cell table:style-name="ce245" office:value-type="float" office:value="8" calcext:value-type="float">
            <text:p>8</text:p>
          </table:table-cell>
          <table:table-cell table:style-name="ce245" office:value-type="float" office:value="9" calcext:value-type="float">
            <text:p>9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string" calcext:value-type="string">
            <text:p>LIQ</text:p>
          </table:table-cell>
          <table:table-cell table:number-columns-repeated="16370"/>
        </table:table-row>
        <table:table-row table:style-name="ro9">
          <table:table-cell/>
          <table:table-cell table:style-name="ce246" office:value-type="string" calcext:value-type="string">
            <text:p>KW</text:p>
          </table:table-cell>
          <table:table-cell table:style-name="ce252" table:number-columns-repeated="11"/>
          <table:table-cell table:style-name="ce246"/>
          <table:table-cell table:number-columns-repeated="16370"/>
        </table:table-row>
        <table:table-row table:style-name="ro9">
          <table:table-cell/>
          <table:table-cell table:style-name="ce246" office:value-type="string" calcext:value-type="string">
            <text:p>VARIACIÓN KW</text:p>
          </table:table-cell>
          <table:table-cell table:style-name="ce252" table:formula="of:=[.P16]" office:value-type="float" office:value="63370.5720445501" calcext:value-type="float">
            <text:p>63371</text:p>
          </table:table-cell>
          <table:table-cell table:style-name="ce252" table:formula="of:=[.P28]" office:value-type="float" office:value="7113.67322533821" calcext:value-type="float">
            <text:p>7114</text:p>
          </table:table-cell>
          <table:table-cell table:style-name="ce252" table:formula="of:=[.P40]" office:value-type="float" office:value="4933.89716889219" calcext:value-type="float">
            <text:p>4934</text:p>
          </table:table-cell>
          <table:table-cell table:style-name="ce252" table:formula="of:=[.P52]" office:value-type="float" office:value="5279.26997071465" calcext:value-type="float">
            <text:p>5279</text:p>
          </table:table-cell>
          <table:table-cell table:style-name="ce252" table:formula="of:=[.P64]" office:value-type="float" office:value="5648.81886866465" calcext:value-type="float">
            <text:p>5649</text:p>
          </table:table-cell>
          <table:table-cell table:style-name="ce252" table:formula="of:=[.P76]" office:value-type="float" office:value="6044.23618947119" calcext:value-type="float">
            <text:p>6044</text:p>
          </table:table-cell>
          <table:table-cell table:style-name="ce252" table:formula="of:=[.P88]" office:value-type="float" office:value="6467.33272273418" calcext:value-type="float">
            <text:p>6467</text:p>
          </table:table-cell>
          <table:table-cell table:style-name="ce252" table:formula="of:=[.P100]" office:value-type="float" office:value="6920.04601332558" calcext:value-type="float">
            <text:p>6920</text:p>
          </table:table-cell>
          <table:table-cell table:style-name="ce252" table:formula="of:=[.P112]" office:value-type="float" office:value="7404.44923425835" calcext:value-type="float">
            <text:p>7404</text:p>
          </table:table-cell>
          <table:table-cell table:style-name="ce252" table:formula="of:=[.P124]" office:value-type="float" office:value="7922.76068065644" calcext:value-type="float">
            <text:p>7923</text:p>
          </table:table-cell>
          <table:table-cell table:style-name="ce252" table:number-columns-repeated="2"/>
          <table:table-cell table:number-columns-repeated="16370"/>
        </table:table-row>
        <table:table-row table:style-name="ro9">
          <table:table-cell/>
          <table:table-cell table:style-name="ce246" office:value-type="string" calcext:value-type="string">
            <text:p>RECUPERO</text:p>
          </table:table-cell>
          <table:table-cell table:style-name="ce246" table:number-columns-repeated="11"/>
          <table:table-cell table:style-name="ce258" table:formula="of:=SUM([.C132:.M132])" office:value-type="float" office:value="121105.056118606" calcext:value-type="float">
            <text:p>121105</text:p>
          </table:table-cell>
          <table:table-cell table:number-columns-repeated="16370"/>
        </table:table-row>
        <table:table-row table:style-name="ro9" table:number-rows-repeated="857">
          <table:table-cell table:number-columns-repeated="16384"/>
        </table:table-row>
        <table:table-row table:style-name="ro4" table:number-rows-repeated="104758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Costos Ventas" table:style-name="ta9">
        <table:table-column table:style-name="co30" table:default-cell-style-name="ce264"/>
        <table:table-column table:style-name="co31" table:default-cell-style-name="ce264"/>
        <table:table-column table:style-name="co23" table:number-columns-repeated="10" table:default-cell-style-name="ce264"/>
        <table:table-column table:style-name="co12" table:number-columns-repeated="13" table:default-cell-style-name="ce264"/>
        <table:table-column table:style-name="co29" table:number-columns-repeated="16359" table:default-cell-style-name="ce264"/>
        <table:table-row table:style-name="ro9">
          <table:table-cell table:style-name="ce263" table:number-columns-repeated="25"/>
          <table:table-cell table:number-columns-repeated="16359"/>
        </table:table-row>
        <table:table-row table:style-name="ro4">
          <table:table-cell table:style-name="ce263"/>
          <table:table-cell table:style-name="ce265" table:number-columns-spanned="6" table:number-rows-spanned="1"/>
          <table:covered-table-cell table:number-columns-repeated="5" table:style-name="ce274"/>
          <table:table-cell table:style-name="ce263" table:number-columns-repeated="18"/>
          <table:table-cell table:number-columns-repeated="16359"/>
        </table:table-row>
        <table:table-row table:style-name="ro4">
          <table:table-cell table:style-name="ce263"/>
          <table:table-cell table:style-name="ce265" office:value-type="string" calcext:value-type="string" table:number-columns-spanned="6" table:number-rows-spanned="1">
            <text:p>Costo de ventas para primer mes</text:p>
          </table:table-cell>
          <table:covered-table-cell table:number-columns-repeated="5" table:style-name="ce274"/>
          <table:table-cell table:style-name="ce263" table:number-columns-repeated="18"/>
          <table:table-cell table:number-columns-repeated="16359"/>
        </table:table-row>
        <table:table-row table:style-name="ro10">
          <table:table-cell table:style-name="ce263" table:number-columns-repeated="25"/>
          <table:table-cell table:number-columns-repeated="16359"/>
        </table:table-row>
        <table:table-row table:style-name="ro9">
          <table:table-cell table:style-name="ce263"/>
          <table:table-cell table:style-name="ce266" office:value-type="string" calcext:value-type="string" table:number-columns-spanned="1" table:number-rows-spanned="2">
            <text:p>Rubro</text:p>
          </table:table-cell>
          <table:table-cell table:style-name="ce275" office:value-type="string" calcext:value-type="string" table:number-columns-spanned="1" table:number-rows-spanned="2">
            <text:p>Costo unitario</text:p>
          </table:table-cell>
          <table:table-cell table:style-name="ce275" office:value-type="string" calcext:value-type="string" table:number-columns-spanned="1" table:number-rows-spanned="2">
            <text:p>Unidades requeridas</text:p>
          </table:table-cell>
          <table:table-cell table:style-name="ce266" office:value-type="string" calcext:value-type="string" table:number-columns-spanned="2" table:number-rows-spanned="1">
            <text:p>Costo</text:p>
          </table:table-cell>
          <table:covered-table-cell table:style-name="ce267"/>
          <table:table-cell table:style-name="ce266" office:value-type="string" calcext:value-type="string" table:number-columns-spanned="1" table:number-rows-spanned="2">
            <text:p>Total</text:p>
          </table:table-cell>
          <table:table-cell table:style-name="ce263" table:number-columns-repeated="18"/>
          <table:table-cell table:number-columns-repeated="16359"/>
        </table:table-row>
        <table:table-row table:style-name="ro11">
          <table:table-cell table:style-name="ce263"/>
          <table:covered-table-cell table:style-name="ce267"/>
          <table:covered-table-cell table:style-name="ce275"/>
          <table:covered-table-cell table:style-name="ce279"/>
          <table:table-cell table:style-name="ce266" office:value-type="string" calcext:value-type="string">
            <text:p>Fijo</text:p>
          </table:table-cell>
          <table:table-cell table:style-name="ce266" office:value-type="string" calcext:value-type="string">
            <text:p>Variable</text:p>
          </table:table-cell>
          <table:covered-table-cell table:style-name="ce267"/>
          <table:table-cell table:style-name="ce263" table:number-columns-repeated="18"/>
          <table:table-cell table:number-columns-repeated="16359"/>
        </table:table-row>
        <table:table-row table:style-name="ro9">
          <table:table-cell table:style-name="ce263"/>
          <table:table-cell table:style-name="ce268" office:value-type="string" calcext:value-type="string">
            <text:p>Costo de ventas</text:p>
          </table:table-cell>
          <table:table-cell table:style-name="ce276" table:number-columns-repeated="4"/>
          <table:table-cell table:style-name="ce277"/>
          <table:table-cell table:style-name="ce263" table:number-columns-repeated="18"/>
          <table:table-cell table:number-columns-repeated="16359"/>
        </table:table-row>
        <table:table-row table:style-name="ro9">
          <table:table-cell table:style-name="ce263"/>
          <table:table-cell table:style-name="ce269" office:value-type="string" calcext:value-type="string">
            <text:p>Compra de mercadería</text:p>
          </table:table-cell>
          <table:table-cell table:style-name="ce277" table:number-columns-repeated="4"/>
          <table:table-cell table:style-name="ce278"/>
          <table:table-cell table:style-name="ce263" table:number-columns-repeated="18"/>
          <table:table-cell table:number-columns-repeated="16359"/>
        </table:table-row>
        <table:table-row table:style-name="ro9">
          <table:table-cell table:style-name="ce263"/>
          <table:table-cell table:style-name="ce269" office:value-type="string" calcext:value-type="string">
            <text:p>Diesel B5</text:p>
          </table:table-cell>
          <table:table-cell table:style-name="ce277" table:formula="of:=+[$Resumen.C10]" office:value-type="float" office:value="8.05889830508475" calcext:value-type="float">
            <text:p>8.06</text:p>
          </table:table-cell>
          <table:table-cell table:style-name="ce269" table:formula="of:=+[$'Presupuesto de ventas'.C13]" office:value-type="float" office:value="4219.90950226244" calcext:value-type="float">
            <text:p>4,220</text:p>
          </table:table-cell>
          <table:table-cell table:style-name="ce277"/>
          <table:table-cell table:style-name="ce277" table:formula="of:=+[.C9]*[.D9]" office:value-type="float" office:value="34007.8215353938" calcext:value-type="float">
            <text:p>34,007.82</text:p>
          </table:table-cell>
          <table:table-cell table:style-name="ce277" table:formula="of:=+[.E9]+[.F9]" office:value-type="float" office:value="34007.8215353938" calcext:value-type="float">
            <text:p>34,007.82</text:p>
          </table:table-cell>
          <table:table-cell table:style-name="ce263" table:number-columns-repeated="18"/>
          <table:table-cell table:number-columns-repeated="16359"/>
        </table:table-row>
        <table:table-row table:style-name="ro9">
          <table:table-cell table:style-name="ce263"/>
          <table:table-cell table:style-name="ce269" office:value-type="string" calcext:value-type="string">
            <text:p>Gasohol 90</text:p>
          </table:table-cell>
          <table:table-cell table:style-name="ce277" table:formula="of:=+[$Resumen.C11]" office:value-type="float" office:value="8.19576271186441" calcext:value-type="float">
            <text:p>8.20</text:p>
          </table:table-cell>
          <table:table-cell table:style-name="ce269" table:formula="of:=+[$'Presupuesto de ventas'.C28]" office:value-type="float" office:value="3164.93212669683" calcext:value-type="float">
            <text:p>3,165</text:p>
          </table:table-cell>
          <table:table-cell table:style-name="ce277"/>
          <table:table-cell table:style-name="ce277" table:formula="of:=+[.C10]*[.D10]" office:value-type="float" office:value="25939.0327095636" calcext:value-type="float">
            <text:p>25,939.03</text:p>
          </table:table-cell>
          <table:table-cell table:style-name="ce277" table:formula="of:=+[.E10]+[.F10]" office:value-type="float" office:value="25939.0327095636" calcext:value-type="float">
            <text:p>25,939.03</text:p>
          </table:table-cell>
          <table:table-cell table:style-name="ce263" table:number-columns-repeated="18"/>
          <table:table-cell table:number-columns-repeated="16359"/>
        </table:table-row>
        <table:table-row table:style-name="ro9">
          <table:table-cell table:style-name="ce263"/>
          <table:table-cell table:style-name="ce269" office:value-type="string" calcext:value-type="string">
            <text:p>Gasohol 95</text:p>
          </table:table-cell>
          <table:table-cell table:style-name="ce277" table:formula="of:=+[$Resumen.C12]" office:value-type="float" office:value="8.45338983050847" calcext:value-type="float">
            <text:p>8.45</text:p>
          </table:table-cell>
          <table:table-cell table:style-name="ce269" table:formula="of:=+[$'Presupuesto de ventas'.C43]" office:value-type="float" office:value="773.650075414781" calcext:value-type="float">
            <text:p>774</text:p>
          </table:table-cell>
          <table:table-cell table:style-name="ce277"/>
          <table:table-cell table:style-name="ce277" table:formula="of:=+[.C11]*[.D11]" office:value-type="float" office:value="6539.96567988343" calcext:value-type="float">
            <text:p>6,539.97</text:p>
          </table:table-cell>
          <table:table-cell table:style-name="ce277" table:formula="of:=+[.E11]+[.F11]" office:value-type="float" office:value="6539.96567988343" calcext:value-type="float">
            <text:p>6,539.97</text:p>
          </table:table-cell>
          <table:table-cell table:style-name="ce263" table:number-columns-repeated="18"/>
          <table:table-cell table:number-columns-repeated="16359"/>
        </table:table-row>
        <table:table-row table:style-name="ro10">
          <table:table-cell table:style-name="ce263"/>
          <table:table-cell table:style-name="ce270" office:value-type="string" calcext:value-type="string">
            <text:p>Total costos de producción</text:p>
          </table:table-cell>
          <table:table-cell table:style-name="ce278" table:number-columns-repeated="2"/>
          <table:table-cell table:style-name="ce278" table:formula="of:=SUM([.E7:.E11])" office:value-type="float" office:value="0" calcext:value-type="float">
            <text:p>0.00</text:p>
          </table:table-cell>
          <table:table-cell table:style-name="ce278" table:formula="of:=SUM([.F7:.F11])" office:value-type="float" office:value="66486.8199248409" calcext:value-type="float">
            <text:p>66,486.82</text:p>
          </table:table-cell>
          <table:table-cell table:style-name="ce278" table:formula="of:=SUM([.G9:.G11])" office:value-type="float" office:value="66486.8199248409" calcext:value-type="float">
            <text:p>66,486.82</text:p>
          </table:table-cell>
          <table:table-cell table:style-name="ce263" table:number-columns-repeated="18"/>
          <table:table-cell table:number-columns-repeated="16359"/>
        </table:table-row>
        <table:table-row table:style-name="ro9">
          <table:table-cell table:style-name="ce263"/>
          <table:table-cell table:style-name="ce271" table:number-columns-spanned="2" table:number-rows-spanned="1"/>
          <table:covered-table-cell table:style-name="ce274"/>
          <table:table-cell table:style-name="ce280" table:number-columns-repeated="3"/>
          <table:table-cell table:style-name="ce263" table:number-columns-repeated="19"/>
          <table:table-cell table:number-columns-repeated="16359"/>
        </table:table-row>
        <table:table-row table:style-name="ro12">
          <table:table-cell table:style-name="ce263" table:number-columns-repeated="25"/>
          <table:table-cell table:number-columns-repeated="16359"/>
        </table:table-row>
        <table:table-row table:style-name="ro10">
          <table:table-cell table:style-name="ce263"/>
          <table:table-cell table:style-name="ce265" office:value-type="string" calcext:value-type="string" table:number-columns-spanned="11" table:number-rows-spanned="1">
            <text:p>PROYECCION ANUAL DE COSTO DE VENTAS</text:p>
          </table:table-cell>
          <table:covered-table-cell table:number-columns-repeated="10" table:style-name="ce265"/>
          <table:table-cell table:style-name="ce263" table:number-columns-repeated="13"/>
          <table:table-cell table:number-columns-repeated="16359"/>
        </table:table-row>
        <table:table-row table:style-name="ro10">
          <table:table-cell table:style-name="ce263"/>
          <table:table-cell table:style-name="ce265" table:number-columns-repeated="5"/>
          <table:table-cell table:style-name="ce263" table:number-columns-repeated="19"/>
          <table:table-cell table:number-columns-repeated="16359"/>
        </table:table-row>
        <table:table-row table:style-name="ro10">
          <table:table-cell table:style-name="ce263"/>
          <table:table-cell table:style-name="ce272" office:value-type="string" calcext:value-type="string">
            <text:p>Descripción</text:p>
          </table:table-cell>
          <table:table-cell table:style-name="ce272" office:value-type="float" office:value="1" calcext:value-type="float">
            <text:p>1</text:p>
          </table:table-cell>
          <table:table-cell table:style-name="ce272" office:value-type="float" office:value="2" calcext:value-type="float">
            <text:p>2</text:p>
          </table:table-cell>
          <table:table-cell table:style-name="ce272" office:value-type="float" office:value="3" calcext:value-type="float">
            <text:p>3</text:p>
          </table:table-cell>
          <table:table-cell table:style-name="ce272" office:value-type="float" office:value="4" calcext:value-type="float">
            <text:p>4</text:p>
          </table:table-cell>
          <table:table-cell table:style-name="ce272" office:value-type="float" office:value="5" calcext:value-type="float">
            <text:p>5</text:p>
          </table:table-cell>
          <table:table-cell table:style-name="ce272" office:value-type="float" office:value="6" calcext:value-type="float">
            <text:p>6</text:p>
          </table:table-cell>
          <table:table-cell table:style-name="ce272" office:value-type="float" office:value="7" calcext:value-type="float">
            <text:p>7</text:p>
          </table:table-cell>
          <table:table-cell table:style-name="ce272" office:value-type="float" office:value="8" calcext:value-type="float">
            <text:p>8</text:p>
          </table:table-cell>
          <table:table-cell table:style-name="ce272" office:value-type="float" office:value="9" calcext:value-type="float">
            <text:p>9</text:p>
          </table:table-cell>
          <table:table-cell table:style-name="ce272" office:value-type="float" office:value="10" calcext:value-type="float">
            <text:p>10</text:p>
          </table:table-cell>
          <table:table-cell table:style-name="ce263" table:number-columns-repeated="13"/>
          <table:table-cell table:number-columns-repeated="16359"/>
        </table:table-row>
        <table:table-row table:style-name="ro10">
          <table:table-cell table:style-name="ce263"/>
          <table:table-cell table:style-name="ce273" office:value-type="string" calcext:value-type="string">
            <text:p>Compra de mercadería</text:p>
          </table:table-cell>
          <table:table-cell table:style-name="ce276" table:number-columns-repeated="4"/>
          <table:table-cell table:style-name="ce281"/>
          <table:table-cell table:style-name="ce282" table:number-columns-repeated="2"/>
          <table:table-cell table:style-name="ce277" table:number-columns-repeated="3"/>
          <table:table-cell table:style-name="ce263" table:number-columns-repeated="13"/>
          <table:table-cell table:number-columns-repeated="16359"/>
        </table:table-row>
        <table:table-row table:style-name="ro10">
          <table:table-cell table:style-name="ce263"/>
          <table:table-cell table:style-name="ce273" office:value-type="string" calcext:value-type="string">
            <text:p>Diesel B5</text:p>
          </table:table-cell>
          <table:table-cell table:style-name="ce276" table:formula="of:=+[$'Presupuesto de ventas'.D74]*[$Resumen.$C$10]" office:value-type="float" office:value="483533.898305085" calcext:value-type="float">
            <text:p>483,533.90</text:p>
          </table:table-cell>
          <table:table-cell table:style-name="ce276" table:formula="of:=+[$'Presupuesto de ventas'.E74]*[$Resumen.$C$10]" office:value-type="float" office:value="523828.389830509" calcext:value-type="float">
            <text:p>523,828.39</text:p>
          </table:table-cell>
          <table:table-cell table:style-name="ce276" table:formula="of:=+[$'Presupuesto de ventas'.F74]*[$Resumen.$C$10]" office:value-type="float" office:value="560496.377118644" calcext:value-type="float">
            <text:p>560,496.38</text:p>
          </table:table-cell>
          <table:table-cell table:style-name="ce276" table:formula="of:=+[$'Presupuesto de ventas'.G74]*[$Resumen.$C$10]" office:value-type="float" office:value="599731.123516949" calcext:value-type="float">
            <text:p>599,731.12</text:p>
          </table:table-cell>
          <table:table-cell table:style-name="ce276" table:formula="of:=+[$'Presupuesto de ventas'.H74]*[$Resumen.$C$10]" office:value-type="float" office:value="641712.302163136" calcext:value-type="float">
            <text:p>641,712.30</text:p>
          </table:table-cell>
          <table:table-cell table:style-name="ce276" table:formula="of:=+[$'Presupuesto de ventas'.I74]*[$Resumen.$C$10]" office:value-type="float" office:value="686632.163314555" calcext:value-type="float">
            <text:p>686,632.16</text:p>
          </table:table-cell>
          <table:table-cell table:style-name="ce276" table:formula="of:=+[$'Presupuesto de ventas'.J74]*[$Resumen.$C$10]" office:value-type="float" office:value="734696.414746574" calcext:value-type="float">
            <text:p>734,696.41</text:p>
          </table:table-cell>
          <table:table-cell table:style-name="ce276" table:formula="of:=+[$'Presupuesto de ventas'.K74]*[$Resumen.$C$10]" office:value-type="float" office:value="786125.163778834" calcext:value-type="float">
            <text:p>786,125.16</text:p>
          </table:table-cell>
          <table:table-cell table:style-name="ce276" table:formula="of:=+[$'Presupuesto de ventas'.L74]*[$Resumen.$C$10]" office:value-type="float" office:value="841153.925243353" calcext:value-type="float">
            <text:p>841,153.93</text:p>
          </table:table-cell>
          <table:table-cell table:style-name="ce276" table:formula="of:=+[$'Presupuesto de ventas'.M74]*[$Resumen.$C$10]" office:value-type="float" office:value="900034.700010388" calcext:value-type="float">
            <text:p>900,034.70</text:p>
          </table:table-cell>
          <table:table-cell table:style-name="ce263" table:number-columns-repeated="13"/>
          <table:table-cell table:number-columns-repeated="16359"/>
        </table:table-row>
        <table:table-row table:style-name="ro10">
          <table:table-cell table:style-name="ce263"/>
          <table:table-cell table:style-name="ce273" office:value-type="string" calcext:value-type="string">
            <text:p>Gasohol 90</text:p>
          </table:table-cell>
          <table:table-cell table:style-name="ce276" table:formula="of:=+[$'Presupuesto de ventas'.D75]*[$Resumen.$C$11]" office:value-type="float" office:value="368809.322033898" calcext:value-type="float">
            <text:p>368,809.32</text:p>
          </table:table-cell>
          <table:table-cell table:style-name="ce276" table:formula="of:=+[$'Presupuesto de ventas'.E75]*[$Resumen.$C$11]" office:value-type="float" office:value="426179.661016949" calcext:value-type="float">
            <text:p>426,179.66</text:p>
          </table:table-cell>
          <table:table-cell table:style-name="ce276" table:formula="of:=+[$'Presupuesto de ventas'.F75]*[$Resumen.$C$11]" office:value-type="float" office:value="456012.237288136" calcext:value-type="float">
            <text:p>456,012.24</text:p>
          </table:table-cell>
          <table:table-cell table:style-name="ce276" table:formula="of:=+[$'Presupuesto de ventas'.G75]*[$Resumen.$C$11]" office:value-type="float" office:value="487933.093898305" calcext:value-type="float">
            <text:p>487,933.09</text:p>
          </table:table-cell>
          <table:table-cell table:style-name="ce276" table:formula="of:=+[$'Presupuesto de ventas'.H75]*[$Resumen.$C$11]" office:value-type="float" office:value="522088.410471187" calcext:value-type="float">
            <text:p>522,088.41</text:p>
          </table:table-cell>
          <table:table-cell table:style-name="ce276" table:formula="of:=+[$'Presupuesto de ventas'.I75]*[$Resumen.$C$11]" office:value-type="float" office:value="558634.59920417" calcext:value-type="float">
            <text:p>558,634.60</text:p>
          </table:table-cell>
          <table:table-cell table:style-name="ce276" table:formula="of:=+[$'Presupuesto de ventas'.J75]*[$Resumen.$C$11]" office:value-type="float" office:value="597739.021148462" calcext:value-type="float">
            <text:p>597,739.02</text:p>
          </table:table-cell>
          <table:table-cell table:style-name="ce276" table:formula="of:=+[$'Presupuesto de ventas'.K75]*[$Resumen.$C$11]" office:value-type="float" office:value="639580.752628854" calcext:value-type="float">
            <text:p>639,580.75</text:p>
          </table:table-cell>
          <table:table-cell table:style-name="ce276" table:formula="of:=+[$'Presupuesto de ventas'.L75]*[$Resumen.$C$11]" office:value-type="float" office:value="684351.405312874" calcext:value-type="float">
            <text:p>684,351.41</text:p>
          </table:table-cell>
          <table:table-cell table:style-name="ce276" table:formula="of:=+[$'Presupuesto de ventas'.M75]*[$Resumen.$C$11]" office:value-type="float" office:value="732256.003684775" calcext:value-type="float">
            <text:p>732,256.00</text:p>
          </table:table-cell>
          <table:table-cell table:style-name="ce263" table:number-columns-repeated="13"/>
          <table:table-cell table:number-columns-repeated="16359"/>
        </table:table-row>
        <table:table-row table:style-name="ro10">
          <table:table-cell table:style-name="ce263"/>
          <table:table-cell table:style-name="ce273" office:value-type="string" calcext:value-type="string">
            <text:p>Gasohol 95</text:p>
          </table:table-cell>
          <table:table-cell table:style-name="ce276" table:formula="of:=+[$'Presupuesto de ventas'.D76]*[$Resumen.$C$12]" office:value-type="float" office:value="92987.2881355932" calcext:value-type="float">
            <text:p>92,987.29</text:p>
          </table:table-cell>
          <table:table-cell table:style-name="ce276" table:formula="of:=+[$'Presupuesto de ventas'.E76]*[$Resumen.$C$12]" office:value-type="float" office:value="101440.677966102" calcext:value-type="float">
            <text:p>101,440.68</text:p>
          </table:table-cell>
          <table:table-cell table:style-name="ce276" table:formula="of:=+[$'Presupuesto de ventas'.F76]*[$Resumen.$C$12]" office:value-type="float" office:value="108541.525423729" calcext:value-type="float">
            <text:p>108,541.53</text:p>
          </table:table-cell>
          <table:table-cell table:style-name="ce276" table:formula="of:=+[$'Presupuesto de ventas'.G76]*[$Resumen.$C$12]" office:value-type="float" office:value="116139.43220339" calcext:value-type="float">
            <text:p>116,139.43</text:p>
          </table:table-cell>
          <table:table-cell table:style-name="ce276" table:formula="of:=+[$'Presupuesto de ventas'.H76]*[$Resumen.$C$12]" office:value-type="float" office:value="124269.192457627" calcext:value-type="float">
            <text:p>124,269.19</text:p>
          </table:table-cell>
          <table:table-cell table:style-name="ce276" table:formula="of:=+[$'Presupuesto de ventas'.I76]*[$Resumen.$C$12]" office:value-type="float" office:value="132968.035929661" calcext:value-type="float">
            <text:p>132,968.04</text:p>
          </table:table-cell>
          <table:table-cell table:style-name="ce276" table:formula="of:=+[$'Presupuesto de ventas'.J76]*[$Resumen.$C$12]" office:value-type="float" office:value="142275.798444737" calcext:value-type="float">
            <text:p>142,275.80</text:p>
          </table:table-cell>
          <table:table-cell table:style-name="ce276" table:formula="of:=+[$'Presupuesto de ventas'.K76]*[$Resumen.$C$12]" office:value-type="float" office:value="152235.104335869" calcext:value-type="float">
            <text:p>152,235.10</text:p>
          </table:table-cell>
          <table:table-cell table:style-name="ce276" table:formula="of:=+[$'Presupuesto de ventas'.L76]*[$Resumen.$C$12]" office:value-type="float" office:value="162891.56163938" calcext:value-type="float">
            <text:p>162,891.56</text:p>
          </table:table-cell>
          <table:table-cell table:style-name="ce276" table:formula="of:=+[$'Presupuesto de ventas'.M76]*[$Resumen.$C$12]" office:value-type="float" office:value="174293.970954136" calcext:value-type="float">
            <text:p>174,293.97</text:p>
          </table:table-cell>
          <table:table-cell table:style-name="ce263" table:number-columns-repeated="13"/>
          <table:table-cell table:number-columns-repeated="16359"/>
        </table:table-row>
        <table:table-row table:style-name="ro10">
          <table:table-cell table:style-name="ce263"/>
          <table:table-cell table:style-name="ce270" office:value-type="string" calcext:value-type="string">
            <text:p>Total costos de produccion</text:p>
          </table:table-cell>
          <table:table-cell table:style-name="ce278" table:formula="of:=SUM([.C19:.C21])" office:value-type="float" office:value="945330.508474576" calcext:value-type="float">
            <text:p>945,330.51</text:p>
          </table:table-cell>
          <table:table-cell table:style-name="ce278" table:formula="of:=SUM([.D19:.D21])" office:value-type="float" office:value="1051448.72881356" calcext:value-type="float">
            <text:p>1,051,448.73</text:p>
          </table:table-cell>
          <table:table-cell table:style-name="ce278" table:formula="of:=SUM([.E19:.E21])" office:value-type="float" office:value="1125050.13983051" calcext:value-type="float">
            <text:p>1,125,050.14</text:p>
          </table:table-cell>
          <table:table-cell table:style-name="ce278" table:formula="of:=SUM([.F19:.F21])" office:value-type="float" office:value="1203803.64961864" calcext:value-type="float">
            <text:p>1,203,803.65</text:p>
          </table:table-cell>
          <table:table-cell table:style-name="ce278" table:formula="of:=SUM([.G19:.G21])" office:value-type="float" office:value="1288069.90509195" calcext:value-type="float">
            <text:p>1,288,069.91</text:p>
          </table:table-cell>
          <table:table-cell table:style-name="ce278" table:formula="of:=SUM([.H19:.H21])" office:value-type="float" office:value="1378234.79844839" calcext:value-type="float">
            <text:p>1,378,234.80</text:p>
          </table:table-cell>
          <table:table-cell table:style-name="ce278" table:formula="of:=SUM([.I19:.I21])" office:value-type="float" office:value="1474711.23433977" calcext:value-type="float">
            <text:p>1,474,711.23</text:p>
          </table:table-cell>
          <table:table-cell table:style-name="ce278" table:formula="of:=SUM([.J19:.J21])" office:value-type="float" office:value="1577941.02074356" calcext:value-type="float">
            <text:p>1,577,941.02</text:p>
          </table:table-cell>
          <table:table-cell table:style-name="ce278" table:formula="of:=SUM([.K19:.K21])" office:value-type="float" office:value="1688396.89219561" calcext:value-type="float">
            <text:p>1,688,396.89</text:p>
          </table:table-cell>
          <table:table-cell table:style-name="ce278" table:formula="of:=SUM([.L19:.L21])" office:value-type="float" office:value="1806584.6746493" calcext:value-type="float">
            <text:p>1,806,584.67</text:p>
          </table:table-cell>
          <table:table-cell table:style-name="ce263" table:number-columns-repeated="13"/>
          <table:table-cell table:number-columns-repeated="16359"/>
        </table:table-row>
        <table:table-row table:style-name="ro9">
          <table:table-cell table:style-name="ce263"/>
          <table:table-cell table:style-name="ce271" table:number-columns-spanned="2" table:number-rows-spanned="1"/>
          <table:covered-table-cell table:style-name="ce274"/>
          <table:table-cell table:style-name="ce280" table:number-columns-repeated="4"/>
          <table:table-cell table:style-name="ce283" table:number-columns-repeated="2"/>
          <table:table-cell table:style-name="ce263" table:number-columns-repeated="16"/>
          <table:table-cell table:number-columns-repeated="16359"/>
        </table:table-row>
        <table:table-row table:style-name="ro9" table:number-rows-repeated="967">
          <table:table-cell table:style-name="ce263" table:number-columns-repeated="25"/>
          <table:table-cell table:number-columns-repeated="16359"/>
        </table:table-row>
        <table:table-row table:style-name="ro4" table:number-rows-repeated="1047585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expression table:name="Precio_Materia_Prima" table:base-cell-address="$'Resumen del escenario 2'.$A$1" table:expression="#REF!"/>
          <table:named-expression table:name="Precio_Queso_Maduro" table:base-cell-address="$'Resumen del escenario 2'.$A$1" table:expression="#REF!"/>
          <table:named-expression table:name="Precio_retablo_unidad" table:base-cell-address="$'Resumen del escenario 2'.$A$1" table:expression="#REF!"/>
          <table:named-expression table:name="TIRE" table:base-cell-address="$'Resumen del escenario 2'.$A$1" table:expression="#REF!"/>
          <table:named-expression table:name="TIRF" table:base-cell-address="$'Resumen del escenario 2'.$A$1" table:expression="#REF!"/>
          <table:named-expression table:name="VANE" table:base-cell-address="$'Resumen del escenario 2'.$A$1" table:expression="#REF!"/>
          <table:named-expression table:name="VANF" table:base-cell-address="$'Resumen del escenario 2'.$A$1" table:expression="#REF!"/>
        </table:named-expressions>
      </table:table>
      <table:table table:name="Sueldos" table:style-name="ta10">
        <table:table-column table:style-name="co32" table:default-cell-style-name="ce284"/>
        <table:table-column table:style-name="co4" table:default-cell-style-name="ce284"/>
        <table:table-column table:style-name="co33" table:visibility="collapse" table:default-cell-style-name="ce284"/>
        <table:table-column table:style-name="co4" table:number-columns-repeated="2" table:default-cell-style-name="ce284"/>
        <table:table-column table:style-name="co33" table:visibility="collapse" table:number-columns-repeated="2" table:default-cell-style-name="ce284"/>
        <table:table-column table:style-name="co34" table:default-cell-style-name="ce284"/>
        <table:table-column table:style-name="co16" table:default-cell-style-name="ce284"/>
        <table:table-column table:style-name="co34" table:number-columns-repeated="2" table:default-cell-style-name="ce284"/>
        <table:table-column table:style-name="co4" table:number-columns-repeated="16373" table:default-cell-style-name="ce284"/>
        <table:table-row table:style-name="ro13">
          <table:table-cell table:number-columns-repeated="16384"/>
        </table:table-row>
        <table:table-row table:style-name="ro13">
          <table:table-cell/>
          <table:table-cell table:style-name="ce285" office:value-type="string" calcext:value-type="string">
            <text:p>PLANILLA DE REMUNERACIONES</text:p>
          </table:table-cell>
          <table:table-cell table:number-columns-repeated="16382"/>
        </table:table-row>
        <table:table-row table:style-name="ro13" table:number-rows-repeated="2">
          <table:table-cell table:number-columns-repeated="16384"/>
        </table:table-row>
        <table:table-row table:style-name="ro13">
          <table:table-cell/>
          <table:table-cell table:style-name="ce286" office:value-type="string" calcext:value-type="string" table:number-columns-spanned="1" table:number-rows-spanned="2">
            <text:p>Perido</text:p>
          </table:table-cell>
          <table:table-cell table:style-name="ce286" office:value-type="string" calcext:value-type="string" table:number-columns-spanned="1" table:number-rows-spanned="2">
            <text:p>Nro</text:p>
          </table:table-cell>
          <table:table-cell table:style-name="ce286" office:value-type="string" calcext:value-type="string" table:number-columns-spanned="1" table:number-rows-spanned="2">
            <text:p>Nombre</text:p>
          </table:table-cell>
          <table:table-cell table:style-name="ce286" office:value-type="string" calcext:value-type="string" table:number-columns-spanned="1" table:number-rows-spanned="2">
            <text:p>Feha de Nac</text:p>
          </table:table-cell>
          <table:table-cell table:style-name="ce286" office:value-type="string" calcext:value-type="string" table:number-columns-spanned="1" table:number-rows-spanned="2">
            <text:p>dni</text:p>
          </table:table-cell>
          <table:table-cell table:style-name="ce286" office:value-type="string" calcext:value-type="string" table:number-columns-spanned="1" table:number-rows-spanned="2">
            <text:p>cussp</text:p>
          </table:table-cell>
          <table:table-cell table:style-name="ce286" office:value-type="string" calcext:value-type="string" table:number-columns-spanned="1" table:number-rows-spanned="2">
            <text:p>Remunerac.</text:p>
          </table:table-cell>
          <table:table-cell table:style-name="ce286" office:value-type="string" calcext:value-type="string" table:number-columns-spanned="1" table:number-rows-spanned="2">
            <text:p>Asignac. Fam.</text:p>
          </table:table-cell>
          <table:table-cell table:style-name="ce286" office:value-type="string" calcext:value-type="string" table:number-columns-spanned="1" table:number-rows-spanned="2">
            <text:p>Gratificación</text:p>
          </table:table-cell>
          <table:table-cell table:style-name="ce286" office:value-type="string" calcext:value-type="string" table:number-columns-spanned="1" table:number-rows-spanned="2">
            <text:p>Indemnizac.</text:p>
          </table:table-cell>
          <table:table-cell table:style-name="ce286" office:value-type="string" calcext:value-type="string" table:number-columns-spanned="1" table:number-rows-spanned="2">
            <text:p>Base imponible</text:p>
          </table:table-cell>
          <table:table-cell table:style-name="ce286" office:value-type="string" calcext:value-type="string" table:number-columns-spanned="1" table:number-rows-spanned="2">
            <text:p>Sistema de pensiones</text:p>
          </table:table-cell>
          <table:table-cell table:style-name="ce297" office:value-type="string" calcext:value-type="string">
            <text:p>ONP</text:p>
          </table:table-cell>
          <table:table-cell table:style-name="ce297" office:value-type="string" calcext:value-type="string">
            <text:p>aporte</text:p>
          </table:table-cell>
          <table:table-cell table:style-name="ce297" office:value-type="string" calcext:value-type="string">
            <text:p>prima</text:p>
          </table:table-cell>
          <table:table-cell table:style-name="ce297" office:value-type="string" calcext:value-type="string">
            <text:p>comision</text:p>
          </table:table-cell>
          <table:table-cell table:style-name="ce297" office:value-type="string" calcext:value-type="string">
            <text:p>esalud</text:p>
          </table:table-cell>
          <table:table-cell table:number-columns-repeated="5"/>
          <table:table-cell table:style-name="ce306"/>
          <table:table-cell table:number-columns-repeated="16360"/>
        </table:table-row>
        <table:table-row table:style-name="ro13">
          <table:table-cell/>
          <table:covered-table-cell table:number-columns-repeated="12" table:style-name="ce287"/>
          <table:table-cell table:style-name="ce298" office:value-type="percentage" office:value="0.13" calcext:value-type="percentage">
            <text:p>13 %</text:p>
          </table:table-cell>
          <table:table-cell table:style-name="ce298" office:value-type="percentage" office:value="0.1" calcext:value-type="percentage">
            <text:p>10 %</text:p>
          </table:table-cell>
          <table:table-cell table:style-name="ce300" office:value-type="percentage" office:value="0.0133" calcext:value-type="percentage">
            <text:p>1.33 %</text:p>
          </table:table-cell>
          <table:table-cell table:style-name="ce300" office:value-type="percentage" office:value="0.0155" calcext:value-type="percentage">
            <text:p>1.55 %</text:p>
          </table:table-cell>
          <table:table-cell table:style-name="ce298" office:value-type="percentage" office:value="0.09" calcext:value-type="percentage">
            <text:p>9 %</text:p>
          </table:table-cell>
          <table:table-cell table:number-columns-repeated="5"/>
          <table:table-cell table:style-name="ce306"/>
          <table:table-cell table:number-columns-repeated="16360"/>
        </table:table-row>
        <table:table-row table:style-name="ro5">
          <table:table-cell/>
          <table:table-cell table:style-name="ce288" office:value-type="date" office:date-value="2021-01-01" calcext:value-type="date" table:number-columns-spanned="1" table:number-rows-spanned="5">
            <text:p>ene-21</text:p>
          </table:table-cell>
          <table:table-cell table:style-name="ce291"/>
          <table:table-cell table:style-name="ce291" office:value-type="string" calcext:value-type="string">
            <text:p>GERENTE GENERAL </text:p>
          </table:table-cell>
          <table:table-cell table:style-name="ce292"/>
          <table:table-cell table:style-name="ce291" table:number-columns-repeated="2"/>
          <table:table-cell table:style-name="ce293" office:value-type="float" office:value="1500" calcext:value-type="float">
            <text:p>1,500.00</text:p>
          </table:table-cell>
          <table:table-cell table:style-name="ce293" table:number-columns-repeated="3"/>
          <table:table-cell table:style-name="ce293" table:formula="of:=+SUM([.H7:.K7])" office:value-type="float" office:value="1500" calcext:value-type="float">
            <text:p>1,500.00</text:p>
          </table:table-cell>
          <table:table-cell table:style-name="ce293"/>
          <table:table-cell table:style-name="ce293" table:formula="of:=+[.L7]*[.$N$6]" office:value-type="float" office:value="195" calcext:value-type="float">
            <text:p>195.00</text:p>
          </table:table-cell>
          <table:table-cell table:style-name="ce293" table:number-columns-repeated="3"/>
          <table:table-cell table:style-name="ce293" table:formula="of:=+[.L7]*[.$R$6]" office:value-type="float" office:value="135" calcext:value-type="float">
            <text:p>135.00</text:p>
          </table:table-cell>
          <table:table-cell table:style-name="ce301"/>
          <table:table-cell table:style-name="ce304" table:number-columns-repeated="3"/>
          <table:table-cell table:style-name="ce305"/>
          <table:table-cell table:style-name="ce306"/>
          <table:table-cell table:number-columns-repeated="16360"/>
        </table:table-row>
        <table:table-row table:style-name="ro5">
          <table:table-cell/>
          <table:covered-table-cell table:style-name="ce289"/>
          <table:table-cell table:style-name="ce291"/>
          <table:table-cell table:style-name="ce291" office:value-type="string" calcext:value-type="string">
            <text:p>TRABAJADOR 1</text:p>
          </table:table-cell>
          <table:table-cell table:style-name="ce292"/>
          <table:table-cell table:style-name="ce291" table:number-columns-repeated="2"/>
          <table:table-cell table:style-name="ce293" office:value-type="float" office:value="930" calcext:value-type="float">
            <text:p>930.00</text:p>
          </table:table-cell>
          <table:table-cell table:style-name="ce293" table:number-columns-repeated="3"/>
          <table:table-cell table:style-name="ce293" table:formula="of:=+SUM([.H8:.K8])" office:value-type="float" office:value="930" calcext:value-type="float">
            <text:p>930.00</text:p>
          </table:table-cell>
          <table:table-cell table:style-name="ce293"/>
          <table:table-cell table:style-name="ce293" table:formula="of:=+[.L8]*[.$N$6]" office:value-type="float" office:value="120.9" calcext:value-type="float">
            <text:p>120.90</text:p>
          </table:table-cell>
          <table:table-cell table:style-name="ce293" table:number-columns-repeated="3"/>
          <table:table-cell table:style-name="ce293" table:formula="of:=+[.L8]*[.$R$6]" office:value-type="float" office:value="83.7" calcext:value-type="float">
            <text:p>83.70</text:p>
          </table:table-cell>
          <table:table-cell table:style-name="ce301"/>
          <table:table-cell table:style-name="ce304" table:number-columns-repeated="3"/>
          <table:table-cell table:style-name="ce305"/>
          <table:table-cell table:style-name="ce306"/>
          <table:table-cell table:number-columns-repeated="16360"/>
        </table:table-row>
        <table:table-row table:style-name="ro5">
          <table:table-cell/>
          <table:covered-table-cell table:style-name="ce289"/>
          <table:table-cell table:style-name="ce291"/>
          <table:table-cell table:style-name="ce291" office:value-type="string" calcext:value-type="string">
            <text:p>TRABAJADOR 2</text:p>
          </table:table-cell>
          <table:table-cell table:style-name="ce292"/>
          <table:table-cell table:style-name="ce291" table:number-columns-repeated="2"/>
          <table:table-cell table:style-name="ce293" office:value-type="float" office:value="930" calcext:value-type="float">
            <text:p>930.00</text:p>
          </table:table-cell>
          <table:table-cell table:style-name="ce293" table:number-columns-repeated="3"/>
          <table:table-cell table:style-name="ce293" table:formula="of:=+SUM([.H9:.K9])" office:value-type="float" office:value="930" calcext:value-type="float">
            <text:p>930.00</text:p>
          </table:table-cell>
          <table:table-cell table:style-name="ce293"/>
          <table:table-cell table:style-name="ce293" table:formula="of:=+[.L9]*[.$N$6]" office:value-type="float" office:value="120.9" calcext:value-type="float">
            <text:p>120.90</text:p>
          </table:table-cell>
          <table:table-cell table:style-name="ce293" table:number-columns-repeated="3"/>
          <table:table-cell table:style-name="ce293" table:formula="of:=+[.L9]*[.$R$6]" office:value-type="float" office:value="83.7" calcext:value-type="float">
            <text:p>83.70</text:p>
          </table:table-cell>
          <table:table-cell table:style-name="ce301"/>
          <table:table-cell table:style-name="ce304" table:number-columns-repeated="3"/>
          <table:table-cell table:style-name="ce305"/>
          <table:table-cell table:style-name="ce306"/>
          <table:table-cell table:number-columns-repeated="16360"/>
        </table:table-row>
        <table:table-row table:style-name="ro5">
          <table:table-cell/>
          <table:covered-table-cell table:style-name="ce289"/>
          <table:table-cell table:style-name="ce291"/>
          <table:table-cell table:style-name="ce291" office:value-type="string" calcext:value-type="string">
            <text:p>TRABAJADOR 3</text:p>
          </table:table-cell>
          <table:table-cell table:style-name="ce292"/>
          <table:table-cell table:style-name="ce291" table:number-columns-repeated="2"/>
          <table:table-cell table:style-name="ce293" office:value-type="float" office:value="930" calcext:value-type="float">
            <text:p>930.00</text:p>
          </table:table-cell>
          <table:table-cell table:style-name="ce293" table:number-columns-repeated="3"/>
          <table:table-cell table:style-name="ce293" table:formula="of:=+SUM([.H10:.K10])" office:value-type="float" office:value="930" calcext:value-type="float">
            <text:p>930.00</text:p>
          </table:table-cell>
          <table:table-cell table:style-name="ce293"/>
          <table:table-cell table:style-name="ce293" table:formula="of:=+[.L10]*[.$N$6]" office:value-type="float" office:value="120.9" calcext:value-type="float">
            <text:p>120.90</text:p>
          </table:table-cell>
          <table:table-cell table:style-name="ce293" table:number-columns-repeated="3"/>
          <table:table-cell table:style-name="ce293" table:formula="of:=+[.L10]*[.$R$6]" office:value-type="float" office:value="83.7" calcext:value-type="float">
            <text:p>83.70</text:p>
          </table:table-cell>
          <table:table-cell table:style-name="ce301"/>
          <table:table-cell table:style-name="ce304" table:number-columns-repeated="3"/>
          <table:table-cell table:style-name="ce305"/>
          <table:table-cell table:style-name="ce306"/>
          <table:table-cell table:number-columns-repeated="16360"/>
        </table:table-row>
        <table:table-row table:style-name="ro5">
          <table:table-cell/>
          <table:covered-table-cell table:style-name="ce290"/>
          <table:table-cell table:style-name="ce291" table:number-columns-repeated="2"/>
          <table:table-cell table:style-name="ce292"/>
          <table:table-cell table:style-name="ce291" table:number-columns-repeated="2"/>
          <table:table-cell table:style-name="ce294" table:formula="of:=+SUM([.H7:.H10])" office:value-type="float" office:value="4290" calcext:value-type="float">
            <text:p>4,290.00</text:p>
          </table:table-cell>
          <table:table-cell table:style-name="ce294" table:formula="of:=+SUM([.I7:.I10])" office:value-type="float" office:value="0" calcext:value-type="float">
            <text:p>0.00</text:p>
          </table:table-cell>
          <table:table-cell table:style-name="ce294" table:formula="of:=+SUM([.J7:.J10])" office:value-type="float" office:value="0" calcext:value-type="float">
            <text:p>0.00</text:p>
          </table:table-cell>
          <table:table-cell table:style-name="ce294" table:formula="of:=+SUM([.K7:.K10])" office:value-type="float" office:value="0" calcext:value-type="float">
            <text:p>0.00</text:p>
          </table:table-cell>
          <table:table-cell table:style-name="ce294" table:formula="of:=+SUM([.L7:.L10])" office:value-type="float" office:value="4290" calcext:value-type="float">
            <text:p>4,290.00</text:p>
          </table:table-cell>
          <table:table-cell table:style-name="ce294"/>
          <table:table-cell table:style-name="ce294" table:formula="of:=+SUM([.N7:.N10])" office:value-type="float" office:value="557.7" calcext:value-type="float">
            <text:p>557.70</text:p>
          </table:table-cell>
          <table:table-cell table:style-name="ce294" table:formula="of:=+SUM([.O7:.O10])" office:value-type="float" office:value="0" calcext:value-type="float">
            <text:p>0.00</text:p>
          </table:table-cell>
          <table:table-cell table:style-name="ce294" table:formula="of:=+SUM([.P7:.P10])" office:value-type="float" office:value="0" calcext:value-type="float">
            <text:p>0.00</text:p>
          </table:table-cell>
          <table:table-cell table:style-name="ce294" table:formula="of:=+SUM([.Q7:.Q10])" office:value-type="float" office:value="0" calcext:value-type="float">
            <text:p>0.00</text:p>
          </table:table-cell>
          <table:table-cell table:style-name="ce294" table:formula="of:=+SUM([.R7:.R10])" office:value-type="float" office:value="386.1" calcext:value-type="float">
            <text:p>386.10</text:p>
          </table:table-cell>
          <table:table-cell table:style-name="ce302" table:formula="of:=+[.O11]+[.P11]+[.Q11]" office:value-type="float" office:value="0" calcext:value-type="float">
            <text:p>0.00</text:p>
          </table:table-cell>
          <table:table-cell table:style-name="ce302"/>
          <table:table-cell table:style-name="ce304" table:number-columns-repeated="2"/>
          <table:table-cell table:style-name="ce305"/>
          <table:table-cell table:style-name="ce306"/>
          <table:table-cell table:number-columns-repeated="16360"/>
        </table:table-row>
        <table:table-row table:style-name="ro5">
          <table:table-cell table:number-columns-repeated="12"/>
          <table:table-cell table:style-name="ce296" office:value-type="string" calcext:value-type="string">
            <text:p>pago</text:p>
          </table:table-cell>
          <table:table-cell table:style-name="ce296" office:value-type="float" office:value="0" calcext:value-type="float">
            <text:p>0</text:p>
          </table:table-cell>
          <table:table-cell table:number-columns-repeated="3" table:style-name="ce299" office:value-type="float" office:value="0" calcext:value-type="float">
            <text:p>0.00</text:p>
          </table:table-cell>
          <table:table-cell table:style-name="ce299" office:value-type="float" office:value="84" calcext:value-type="float">
            <text:p>84.00</text:p>
          </table:table-cell>
          <table:table-cell table:style-name="ce302" table:formula="of:=+[.L11]-[.N11]-[.S11]" office:value-type="float" office:value="3732.3" calcext:value-type="float">
            <text:p>3732.30</text:p>
          </table:table-cell>
          <table:table-cell table:style-name="ce304" table:number-columns-repeated="3"/>
          <table:table-cell table:style-name="ce305"/>
          <table:table-cell table:style-name="ce306"/>
          <table:table-cell table:number-columns-repeated="16360"/>
        </table:table-row>
        <table:table-row table:style-name="ro5">
          <table:table-cell table:number-columns-repeated="12"/>
          <table:table-cell table:style-name="ce296" office:value-type="string" calcext:value-type="string">
            <text:p>saldo</text:p>
          </table:table-cell>
          <table:table-cell table:style-name="ce296" office:value-type="float" office:value="0" calcext:value-type="float">
            <text:p>0</text:p>
          </table:table-cell>
          <table:table-cell table:number-columns-repeated="4" table:style-name="ce299" office:value-type="float" office:value="0" calcext:value-type="float">
            <text:p>0.00</text:p>
          </table:table-cell>
          <table:table-cell table:style-name="ce301"/>
          <table:table-cell table:style-name="ce304" table:number-columns-repeated="3"/>
          <table:table-cell table:style-name="ce305"/>
          <table:table-cell table:style-name="ce306"/>
          <table:table-cell table:number-columns-repeated="16360"/>
        </table:table-row>
        <table:table-row table:style-name="ro5">
          <table:table-cell table:number-columns-repeated="18"/>
          <table:table-cell table:style-name="ce303"/>
          <table:table-cell table:number-columns-repeated="4"/>
          <table:table-cell table:style-name="ce306"/>
          <table:table-cell table:number-columns-repeated="16360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style-name="ce286" office:value-type="string" calcext:value-type="string" table:number-columns-spanned="1" table:number-rows-spanned="2">
            <text:p>Perido</text:p>
          </table:table-cell>
          <table:table-cell table:style-name="ce286" office:value-type="string" calcext:value-type="string" table:number-columns-spanned="1" table:number-rows-spanned="2">
            <text:p>Nro</text:p>
          </table:table-cell>
          <table:table-cell table:style-name="ce286" office:value-type="string" calcext:value-type="string" table:number-columns-spanned="1" table:number-rows-spanned="2">
            <text:p>Nombre</text:p>
          </table:table-cell>
          <table:table-cell table:style-name="ce286" office:value-type="string" calcext:value-type="string" table:number-columns-spanned="1" table:number-rows-spanned="2">
            <text:p>Feha de Nac</text:p>
          </table:table-cell>
          <table:table-cell table:style-name="ce286" office:value-type="string" calcext:value-type="string" table:number-columns-spanned="1" table:number-rows-spanned="2">
            <text:p>dni</text:p>
          </table:table-cell>
          <table:table-cell table:style-name="ce286" office:value-type="string" calcext:value-type="string" table:number-columns-spanned="1" table:number-rows-spanned="2">
            <text:p>cussp</text:p>
          </table:table-cell>
          <table:table-cell table:style-name="ce286" office:value-type="string" calcext:value-type="string" table:number-columns-spanned="1" table:number-rows-spanned="2">
            <text:p>Remunerac.</text:p>
          </table:table-cell>
          <table:table-cell table:style-name="ce286" office:value-type="string" calcext:value-type="string" table:number-columns-spanned="1" table:number-rows-spanned="2">
            <text:p>Asignac. Fam.</text:p>
          </table:table-cell>
          <table:table-cell table:style-name="ce286" office:value-type="string" calcext:value-type="string" table:number-columns-spanned="1" table:number-rows-spanned="2">
            <text:p>Gratificación</text:p>
          </table:table-cell>
          <table:table-cell table:style-name="ce286" office:value-type="string" calcext:value-type="string" table:number-columns-spanned="1" table:number-rows-spanned="2">
            <text:p>Indemnizac.</text:p>
          </table:table-cell>
          <table:table-cell table:style-name="ce286" office:value-type="string" calcext:value-type="string" table:number-columns-spanned="1" table:number-rows-spanned="2">
            <text:p>Base imponible</text:p>
          </table:table-cell>
          <table:table-cell table:style-name="ce286" office:value-type="string" calcext:value-type="string" table:number-columns-spanned="1" table:number-rows-spanned="2">
            <text:p>Sistema de pensiones</text:p>
          </table:table-cell>
          <table:table-cell table:style-name="ce297" office:value-type="string" calcext:value-type="string">
            <text:p>ONP</text:p>
          </table:table-cell>
          <table:table-cell table:style-name="ce297" office:value-type="string" calcext:value-type="string">
            <text:p>aporte</text:p>
          </table:table-cell>
          <table:table-cell table:style-name="ce297" office:value-type="string" calcext:value-type="string">
            <text:p>prima</text:p>
          </table:table-cell>
          <table:table-cell table:style-name="ce297" office:value-type="string" calcext:value-type="string">
            <text:p>comision</text:p>
          </table:table-cell>
          <table:table-cell table:style-name="ce297" office:value-type="string" calcext:value-type="string">
            <text:p>esalud</text:p>
          </table:table-cell>
          <table:table-cell table:number-columns-repeated="16366"/>
        </table:table-row>
        <table:table-row table:style-name="ro13">
          <table:table-cell/>
          <table:covered-table-cell table:number-columns-repeated="12" table:style-name="ce287"/>
          <table:table-cell table:style-name="ce298" office:value-type="percentage" office:value="0.13" calcext:value-type="percentage">
            <text:p>13 %</text:p>
          </table:table-cell>
          <table:table-cell table:style-name="ce298" office:value-type="percentage" office:value="0.1" calcext:value-type="percentage">
            <text:p>10 %</text:p>
          </table:table-cell>
          <table:table-cell table:style-name="ce300" office:value-type="percentage" office:value="0.0133" calcext:value-type="percentage">
            <text:p>1.33 %</text:p>
          </table:table-cell>
          <table:table-cell table:style-name="ce300" office:value-type="percentage" office:value="0.0155" calcext:value-type="percentage">
            <text:p>1.55 %</text:p>
          </table:table-cell>
          <table:table-cell table:style-name="ce298" office:value-type="percentage" office:value="0.09" calcext:value-type="percentage">
            <text:p>9 %</text:p>
          </table:table-cell>
          <table:table-cell table:number-columns-repeated="16366"/>
        </table:table-row>
        <table:table-row table:style-name="ro13">
          <table:table-cell/>
          <table:table-cell table:style-name="ce288" office:value-type="date" office:date-value="2021-02-01" calcext:value-type="date" table:number-columns-spanned="1" table:number-rows-spanned="5">
            <text:p>feb-21</text:p>
          </table:table-cell>
          <table:table-cell table:style-name="ce291"/>
          <table:table-cell table:style-name="ce291" office:value-type="string" calcext:value-type="string">
            <text:p>GERENTE GENERAL </text:p>
          </table:table-cell>
          <table:table-cell table:style-name="ce292"/>
          <table:table-cell table:style-name="ce291" table:number-columns-repeated="2"/>
          <table:table-cell table:style-name="ce293" office:value-type="float" office:value="1500" calcext:value-type="float">
            <text:p>1,500.00</text:p>
          </table:table-cell>
          <table:table-cell table:style-name="ce293" table:number-columns-repeated="3"/>
          <table:table-cell table:style-name="ce293" table:formula="of:=+SUM([.H18:.K18])" office:value-type="float" office:value="1500" calcext:value-type="float">
            <text:p>1,500.00</text:p>
          </table:table-cell>
          <table:table-cell table:style-name="ce293"/>
          <table:table-cell table:style-name="ce293" table:formula="of:=+[.L18]*[.$N$6]" office:value-type="float" office:value="195" calcext:value-type="float">
            <text:p>195.00</text:p>
          </table:table-cell>
          <table:table-cell table:style-name="ce293" table:number-columns-repeated="3"/>
          <table:table-cell table:style-name="ce293" table:formula="of:=+[.L18]*[.$R$6]" office:value-type="float" office:value="135" calcext:value-type="float">
            <text:p>135.00</text:p>
          </table:table-cell>
          <table:table-cell table:number-columns-repeated="16366"/>
        </table:table-row>
        <table:table-row table:style-name="ro13">
          <table:table-cell/>
          <table:covered-table-cell table:style-name="ce289"/>
          <table:table-cell table:style-name="ce291"/>
          <table:table-cell table:style-name="ce291" office:value-type="string" calcext:value-type="string">
            <text:p>TRABAJADOR 1</text:p>
          </table:table-cell>
          <table:table-cell table:style-name="ce292"/>
          <table:table-cell table:style-name="ce291" table:number-columns-repeated="2"/>
          <table:table-cell table:style-name="ce293" office:value-type="float" office:value="930" calcext:value-type="float">
            <text:p>930.00</text:p>
          </table:table-cell>
          <table:table-cell table:style-name="ce293" table:number-columns-repeated="3"/>
          <table:table-cell table:style-name="ce293" table:formula="of:=+SUM([.H19:.K19])" office:value-type="float" office:value="930" calcext:value-type="float">
            <text:p>930.00</text:p>
          </table:table-cell>
          <table:table-cell table:style-name="ce293"/>
          <table:table-cell table:style-name="ce293" table:formula="of:=+[.L19]*[.$N$6]" office:value-type="float" office:value="120.9" calcext:value-type="float">
            <text:p>120.90</text:p>
          </table:table-cell>
          <table:table-cell table:style-name="ce293" table:number-columns-repeated="3"/>
          <table:table-cell table:style-name="ce293" table:formula="of:=+[.L19]*[.$R$6]" office:value-type="float" office:value="83.7" calcext:value-type="float">
            <text:p>83.70</text:p>
          </table:table-cell>
          <table:table-cell table:number-columns-repeated="16366"/>
        </table:table-row>
        <table:table-row table:style-name="ro13">
          <table:table-cell/>
          <table:covered-table-cell table:style-name="ce289"/>
          <table:table-cell table:style-name="ce291"/>
          <table:table-cell table:style-name="ce291" office:value-type="string" calcext:value-type="string">
            <text:p>TRABAJADOR 2</text:p>
          </table:table-cell>
          <table:table-cell table:style-name="ce292"/>
          <table:table-cell table:style-name="ce291" table:number-columns-repeated="2"/>
          <table:table-cell table:style-name="ce293" office:value-type="float" office:value="930" calcext:value-type="float">
            <text:p>930.00</text:p>
          </table:table-cell>
          <table:table-cell table:style-name="ce293" table:number-columns-repeated="3"/>
          <table:table-cell table:style-name="ce293" table:formula="of:=+SUM([.H20:.K20])" office:value-type="float" office:value="930" calcext:value-type="float">
            <text:p>930.00</text:p>
          </table:table-cell>
          <table:table-cell table:style-name="ce293"/>
          <table:table-cell table:style-name="ce293" table:formula="of:=+[.L20]*[.$N$6]" office:value-type="float" office:value="120.9" calcext:value-type="float">
            <text:p>120.90</text:p>
          </table:table-cell>
          <table:table-cell table:style-name="ce293" table:number-columns-repeated="3"/>
          <table:table-cell table:style-name="ce293" table:formula="of:=+[.L20]*[.$R$6]" office:value-type="float" office:value="83.7" calcext:value-type="float">
            <text:p>83.70</text:p>
          </table:table-cell>
          <table:table-cell table:number-columns-repeated="16366"/>
        </table:table-row>
        <table:table-row table:style-name="ro13">
          <table:table-cell/>
          <table:covered-table-cell table:style-name="ce289"/>
          <table:table-cell table:style-name="ce291"/>
          <table:table-cell table:style-name="ce291" office:value-type="string" calcext:value-type="string">
            <text:p>TRABAJADOR 3</text:p>
          </table:table-cell>
          <table:table-cell table:style-name="ce292"/>
          <table:table-cell table:style-name="ce291" table:number-columns-repeated="2"/>
          <table:table-cell table:style-name="ce293" office:value-type="float" office:value="930" calcext:value-type="float">
            <text:p>930.00</text:p>
          </table:table-cell>
          <table:table-cell table:style-name="ce293" table:number-columns-repeated="3"/>
          <table:table-cell table:style-name="ce293" table:formula="of:=+SUM([.H21:.K21])" office:value-type="float" office:value="930" calcext:value-type="float">
            <text:p>930.00</text:p>
          </table:table-cell>
          <table:table-cell table:style-name="ce293"/>
          <table:table-cell table:style-name="ce293" table:formula="of:=+[.L21]*[.$N$6]" office:value-type="float" office:value="120.9" calcext:value-type="float">
            <text:p>120.90</text:p>
          </table:table-cell>
          <table:table-cell table:style-name="ce293" table:number-columns-repeated="3"/>
          <table:table-cell table:style-name="ce293" table:formula="of:=+[.L21]*[.$R$6]" office:value-type="float" office:value="83.7" calcext:value-type="float">
            <text:p>83.70</text:p>
          </table:table-cell>
          <table:table-cell table:number-columns-repeated="16366"/>
        </table:table-row>
        <table:table-row table:style-name="ro13">
          <table:table-cell/>
          <table:covered-table-cell table:style-name="ce290"/>
          <table:table-cell table:style-name="ce291" table:number-columns-repeated="2"/>
          <table:table-cell table:style-name="ce292"/>
          <table:table-cell table:style-name="ce291" table:number-columns-repeated="2"/>
          <table:table-cell table:style-name="ce294" table:formula="of:=+SUM([.H18:.H21])" office:value-type="float" office:value="4290" calcext:value-type="float">
            <text:p>4,290.00</text:p>
          </table:table-cell>
          <table:table-cell table:style-name="ce294" table:formula="of:=+SUM([.I18:.I21])" office:value-type="float" office:value="0" calcext:value-type="float">
            <text:p>0.00</text:p>
          </table:table-cell>
          <table:table-cell table:style-name="ce294" table:formula="of:=+SUM([.J18:.J21])" office:value-type="float" office:value="0" calcext:value-type="float">
            <text:p>0.00</text:p>
          </table:table-cell>
          <table:table-cell table:style-name="ce294" table:formula="of:=+SUM([.K18:.K21])" office:value-type="float" office:value="0" calcext:value-type="float">
            <text:p>0.00</text:p>
          </table:table-cell>
          <table:table-cell table:style-name="ce294" table:formula="of:=+SUM([.L18:.L21])" office:value-type="float" office:value="4290" calcext:value-type="float">
            <text:p>4,290.00</text:p>
          </table:table-cell>
          <table:table-cell table:style-name="ce294"/>
          <table:table-cell table:style-name="ce294" table:formula="of:=+SUM([.N18:.N21])" office:value-type="float" office:value="557.7" calcext:value-type="float">
            <text:p>557.70</text:p>
          </table:table-cell>
          <table:table-cell table:style-name="ce294" table:formula="of:=+SUM([.O18:.O21])" office:value-type="float" office:value="0" calcext:value-type="float">
            <text:p>0.00</text:p>
          </table:table-cell>
          <table:table-cell table:style-name="ce294" table:formula="of:=+SUM([.P18:.P21])" office:value-type="float" office:value="0" calcext:value-type="float">
            <text:p>0.00</text:p>
          </table:table-cell>
          <table:table-cell table:style-name="ce294" table:formula="of:=+SUM([.Q18:.Q21])" office:value-type="float" office:value="0" calcext:value-type="float">
            <text:p>0.00</text:p>
          </table:table-cell>
          <table:table-cell table:style-name="ce294" table:formula="of:=+SUM([.R18:.R21])" office:value-type="float" office:value="386.1" calcext:value-type="float">
            <text:p>386.10</text:p>
          </table:table-cell>
          <table:table-cell table:style-name="ce302" table:formula="of:=+[.O22]+[.P22]+[.Q2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3">
          <table:table-cell table:number-columns-repeated="12"/>
          <table:table-cell table:style-name="ce296" office:value-type="string" calcext:value-type="string">
            <text:p>pago</text:p>
          </table:table-cell>
          <table:table-cell table:style-name="ce296" office:value-type="float" office:value="0" calcext:value-type="float">
            <text:p>0</text:p>
          </table:table-cell>
          <table:table-cell table:number-columns-repeated="3" table:style-name="ce299" office:value-type="float" office:value="0" calcext:value-type="float">
            <text:p>0.00</text:p>
          </table:table-cell>
          <table:table-cell table:style-name="ce299" office:value-type="float" office:value="84" calcext:value-type="float">
            <text:p>84.00</text:p>
          </table:table-cell>
          <table:table-cell table:style-name="ce302" table:formula="of:=+[.L22]-[.N22]-[.S22]" office:value-type="float" office:value="3732.3" calcext:value-type="float">
            <text:p>3732.30</text:p>
          </table:table-cell>
          <table:table-cell table:number-columns-repeated="16365"/>
        </table:table-row>
        <table:table-row table:style-name="ro13">
          <table:table-cell table:number-columns-repeated="12"/>
          <table:table-cell table:style-name="ce296" office:value-type="string" calcext:value-type="string">
            <text:p>saldo</text:p>
          </table:table-cell>
          <table:table-cell table:style-name="ce296" office:value-type="float" office:value="0" calcext:value-type="float">
            <text:p>0</text:p>
          </table:table-cell>
          <table:table-cell table:number-columns-repeated="4" table:style-name="ce299" office:value-type="float" office:value="0" calcext:value-type="float">
            <text:p>0.00</text:p>
          </table:table-cell>
          <table:table-cell table:number-columns-repeated="16366"/>
        </table:table-row>
        <table:table-row table:style-name="ro13" table:number-rows-repeated="2">
          <table:table-cell table:number-columns-repeated="16384"/>
        </table:table-row>
        <table:table-row table:style-name="ro13">
          <table:table-cell/>
          <table:table-cell table:style-name="ce286" office:value-type="string" calcext:value-type="string" table:number-columns-spanned="1" table:number-rows-spanned="2">
            <text:p>Perido</text:p>
          </table:table-cell>
          <table:table-cell table:style-name="ce286" office:value-type="string" calcext:value-type="string" table:number-columns-spanned="1" table:number-rows-spanned="2">
            <text:p>Nro</text:p>
          </table:table-cell>
          <table:table-cell table:style-name="ce286" office:value-type="string" calcext:value-type="string" table:number-columns-spanned="1" table:number-rows-spanned="2">
            <text:p>Nombre</text:p>
          </table:table-cell>
          <table:table-cell table:style-name="ce286" office:value-type="string" calcext:value-type="string" table:number-columns-spanned="1" table:number-rows-spanned="2">
            <text:p>Feha de Nac</text:p>
          </table:table-cell>
          <table:table-cell table:style-name="ce286" office:value-type="string" calcext:value-type="string" table:number-columns-spanned="1" table:number-rows-spanned="2">
            <text:p>dni</text:p>
          </table:table-cell>
          <table:table-cell table:style-name="ce286" office:value-type="string" calcext:value-type="string" table:number-columns-spanned="1" table:number-rows-spanned="2">
            <text:p>cussp</text:p>
          </table:table-cell>
          <table:table-cell table:style-name="ce286" office:value-type="string" calcext:value-type="string" table:number-columns-spanned="1" table:number-rows-spanned="2">
            <text:p>Remunerac.</text:p>
          </table:table-cell>
          <table:table-cell table:style-name="ce286" office:value-type="string" calcext:value-type="string" table:number-columns-spanned="1" table:number-rows-spanned="2">
            <text:p>Asignac. Fam.</text:p>
          </table:table-cell>
          <table:table-cell table:style-name="ce286" office:value-type="string" calcext:value-type="string" table:number-columns-spanned="1" table:number-rows-spanned="2">
            <text:p>Gratificación</text:p>
          </table:table-cell>
          <table:table-cell table:style-name="ce286" office:value-type="string" calcext:value-type="string" table:number-columns-spanned="1" table:number-rows-spanned="2">
            <text:p>Indemnizac.</text:p>
          </table:table-cell>
          <table:table-cell table:style-name="ce286" office:value-type="string" calcext:value-type="string" table:number-columns-spanned="1" table:number-rows-spanned="2">
            <text:p>Base imponible</text:p>
          </table:table-cell>
          <table:table-cell table:style-name="ce286" office:value-type="string" calcext:value-type="string" table:number-columns-spanned="1" table:number-rows-spanned="2">
            <text:p>Sistema de pensiones</text:p>
          </table:table-cell>
          <table:table-cell table:style-name="ce297" office:value-type="string" calcext:value-type="string">
            <text:p>ONP</text:p>
          </table:table-cell>
          <table:table-cell table:style-name="ce297" office:value-type="string" calcext:value-type="string">
            <text:p>aporte</text:p>
          </table:table-cell>
          <table:table-cell table:style-name="ce297" office:value-type="string" calcext:value-type="string">
            <text:p>prima</text:p>
          </table:table-cell>
          <table:table-cell table:style-name="ce297" office:value-type="string" calcext:value-type="string">
            <text:p>comision</text:p>
          </table:table-cell>
          <table:table-cell table:style-name="ce297" office:value-type="string" calcext:value-type="string">
            <text:p>esalud</text:p>
          </table:table-cell>
          <table:table-cell table:number-columns-repeated="16366"/>
        </table:table-row>
        <table:table-row table:style-name="ro13">
          <table:table-cell/>
          <table:covered-table-cell table:number-columns-repeated="12" table:style-name="ce287"/>
          <table:table-cell table:style-name="ce298" office:value-type="percentage" office:value="0.13" calcext:value-type="percentage">
            <text:p>13 %</text:p>
          </table:table-cell>
          <table:table-cell table:style-name="ce298" office:value-type="percentage" office:value="0.1" calcext:value-type="percentage">
            <text:p>10 %</text:p>
          </table:table-cell>
          <table:table-cell table:style-name="ce300" office:value-type="percentage" office:value="0.0133" calcext:value-type="percentage">
            <text:p>1.33 %</text:p>
          </table:table-cell>
          <table:table-cell table:style-name="ce300" office:value-type="percentage" office:value="0.0155" calcext:value-type="percentage">
            <text:p>1.55 %</text:p>
          </table:table-cell>
          <table:table-cell table:style-name="ce298" office:value-type="percentage" office:value="0.09" calcext:value-type="percentage">
            <text:p>9 %</text:p>
          </table:table-cell>
          <table:table-cell table:number-columns-repeated="16366"/>
        </table:table-row>
        <table:table-row table:style-name="ro13">
          <table:table-cell/>
          <table:table-cell table:style-name="ce288" office:value-type="date" office:date-value="2021-03-01" calcext:value-type="date" table:number-columns-spanned="1" table:number-rows-spanned="5">
            <text:p>mar-21</text:p>
          </table:table-cell>
          <table:table-cell table:style-name="ce291"/>
          <table:table-cell table:style-name="ce291" office:value-type="string" calcext:value-type="string">
            <text:p>GERENTE GENERAL </text:p>
          </table:table-cell>
          <table:table-cell table:style-name="ce292"/>
          <table:table-cell table:style-name="ce291" table:number-columns-repeated="2"/>
          <table:table-cell table:style-name="ce293" office:value-type="float" office:value="1500" calcext:value-type="float">
            <text:p>1,500.00</text:p>
          </table:table-cell>
          <table:table-cell table:style-name="ce293" table:number-columns-repeated="3"/>
          <table:table-cell table:style-name="ce293" table:formula="of:=+SUM([.H29:.K29])" office:value-type="float" office:value="1500" calcext:value-type="float">
            <text:p>1,500.00</text:p>
          </table:table-cell>
          <table:table-cell table:style-name="ce293"/>
          <table:table-cell table:style-name="ce293" table:formula="of:=+[.L29]*[.$N$6]" office:value-type="float" office:value="195" calcext:value-type="float">
            <text:p>195.00</text:p>
          </table:table-cell>
          <table:table-cell table:style-name="ce293" table:number-columns-repeated="3"/>
          <table:table-cell table:style-name="ce293" table:formula="of:=+[.L29]*[.$R$6]" office:value-type="float" office:value="135" calcext:value-type="float">
            <text:p>135.00</text:p>
          </table:table-cell>
          <table:table-cell table:number-columns-repeated="16366"/>
        </table:table-row>
        <table:table-row table:style-name="ro13">
          <table:table-cell/>
          <table:covered-table-cell table:style-name="ce289"/>
          <table:table-cell table:style-name="ce291"/>
          <table:table-cell table:style-name="ce291" office:value-type="string" calcext:value-type="string">
            <text:p>TRABAJADOR 1</text:p>
          </table:table-cell>
          <table:table-cell table:style-name="ce292"/>
          <table:table-cell table:style-name="ce291" table:number-columns-repeated="2"/>
          <table:table-cell table:style-name="ce293" office:value-type="float" office:value="930" calcext:value-type="float">
            <text:p>930.00</text:p>
          </table:table-cell>
          <table:table-cell table:style-name="ce293" table:number-columns-repeated="3"/>
          <table:table-cell table:style-name="ce293" table:formula="of:=+SUM([.H30:.K30])" office:value-type="float" office:value="930" calcext:value-type="float">
            <text:p>930.00</text:p>
          </table:table-cell>
          <table:table-cell table:style-name="ce293"/>
          <table:table-cell table:style-name="ce293" table:formula="of:=+[.L30]*[.$N$6]" office:value-type="float" office:value="120.9" calcext:value-type="float">
            <text:p>120.90</text:p>
          </table:table-cell>
          <table:table-cell table:style-name="ce293" table:number-columns-repeated="4"/>
          <table:table-cell table:number-columns-repeated="16366"/>
        </table:table-row>
        <table:table-row table:style-name="ro13">
          <table:table-cell/>
          <table:covered-table-cell table:style-name="ce289"/>
          <table:table-cell table:style-name="ce291"/>
          <table:table-cell table:style-name="ce291" office:value-type="string" calcext:value-type="string">
            <text:p>TRABAJADOR 2</text:p>
          </table:table-cell>
          <table:table-cell table:style-name="ce292"/>
          <table:table-cell table:style-name="ce291" table:number-columns-repeated="2"/>
          <table:table-cell table:style-name="ce293" office:value-type="float" office:value="930" calcext:value-type="float">
            <text:p>930.00</text:p>
          </table:table-cell>
          <table:table-cell table:style-name="ce293" table:number-columns-repeated="3"/>
          <table:table-cell table:style-name="ce293" table:formula="of:=+SUM([.H31:.K31])" office:value-type="float" office:value="930" calcext:value-type="float">
            <text:p>930.00</text:p>
          </table:table-cell>
          <table:table-cell table:style-name="ce293"/>
          <table:table-cell table:style-name="ce293" table:formula="of:=+[.L31]*[.$N$6]" office:value-type="float" office:value="120.9" calcext:value-type="float">
            <text:p>120.90</text:p>
          </table:table-cell>
          <table:table-cell table:style-name="ce293" table:number-columns-repeated="3"/>
          <table:table-cell table:style-name="ce293" table:formula="of:=+[.L31]*[.$R$6]" office:value-type="float" office:value="83.7" calcext:value-type="float">
            <text:p>83.70</text:p>
          </table:table-cell>
          <table:table-cell table:number-columns-repeated="16366"/>
        </table:table-row>
        <table:table-row table:style-name="ro13">
          <table:table-cell/>
          <table:covered-table-cell table:style-name="ce289"/>
          <table:table-cell table:style-name="ce291"/>
          <table:table-cell table:style-name="ce291" office:value-type="string" calcext:value-type="string">
            <text:p>TRABAJADOR 3</text:p>
          </table:table-cell>
          <table:table-cell table:style-name="ce292"/>
          <table:table-cell table:style-name="ce291" table:number-columns-repeated="2"/>
          <table:table-cell table:style-name="ce293" office:value-type="float" office:value="930" calcext:value-type="float">
            <text:p>930.00</text:p>
          </table:table-cell>
          <table:table-cell table:style-name="ce293" table:number-columns-repeated="3"/>
          <table:table-cell table:style-name="ce293" table:formula="of:=+SUM([.H32:.K32])" office:value-type="float" office:value="930" calcext:value-type="float">
            <text:p>930.00</text:p>
          </table:table-cell>
          <table:table-cell table:style-name="ce293"/>
          <table:table-cell table:style-name="ce293" table:formula="of:=+[.L32]*[.$N$6]" office:value-type="float" office:value="120.9" calcext:value-type="float">
            <text:p>120.90</text:p>
          </table:table-cell>
          <table:table-cell table:style-name="ce293" table:number-columns-repeated="3"/>
          <table:table-cell table:style-name="ce293" table:formula="of:=+[.L32]*[.$R$6]" office:value-type="float" office:value="83.7" calcext:value-type="float">
            <text:p>83.70</text:p>
          </table:table-cell>
          <table:table-cell table:number-columns-repeated="16366"/>
        </table:table-row>
        <table:table-row table:style-name="ro13">
          <table:table-cell/>
          <table:covered-table-cell table:style-name="ce290"/>
          <table:table-cell table:style-name="ce291" table:number-columns-repeated="2"/>
          <table:table-cell table:style-name="ce292"/>
          <table:table-cell table:style-name="ce291" table:number-columns-repeated="2"/>
          <table:table-cell table:style-name="ce294" table:formula="of:=+SUM([.H29:.H32])" office:value-type="float" office:value="4290" calcext:value-type="float">
            <text:p>4,290.00</text:p>
          </table:table-cell>
          <table:table-cell table:style-name="ce294" table:formula="of:=+SUM([.I29:.I32])" office:value-type="float" office:value="0" calcext:value-type="float">
            <text:p>0.00</text:p>
          </table:table-cell>
          <table:table-cell table:style-name="ce294" table:formula="of:=+SUM([.J29:.J32])" office:value-type="float" office:value="0" calcext:value-type="float">
            <text:p>0.00</text:p>
          </table:table-cell>
          <table:table-cell table:style-name="ce294" table:formula="of:=+SUM([.K29:.K32])" office:value-type="float" office:value="0" calcext:value-type="float">
            <text:p>0.00</text:p>
          </table:table-cell>
          <table:table-cell table:style-name="ce294" table:formula="of:=+SUM([.L29:.L32])" office:value-type="float" office:value="4290" calcext:value-type="float">
            <text:p>4,290.00</text:p>
          </table:table-cell>
          <table:table-cell table:style-name="ce294"/>
          <table:table-cell table:style-name="ce294" table:formula="of:=+SUM([.N29:.N32])" office:value-type="float" office:value="557.7" calcext:value-type="float">
            <text:p>557.70</text:p>
          </table:table-cell>
          <table:table-cell table:style-name="ce294" table:formula="of:=+SUM([.O29:.O32])" office:value-type="float" office:value="0" calcext:value-type="float">
            <text:p>0.00</text:p>
          </table:table-cell>
          <table:table-cell table:style-name="ce294" table:formula="of:=+SUM([.P29:.P32])" office:value-type="float" office:value="0" calcext:value-type="float">
            <text:p>0.00</text:p>
          </table:table-cell>
          <table:table-cell table:style-name="ce294" table:formula="of:=+SUM([.Q29:.Q32])" office:value-type="float" office:value="0" calcext:value-type="float">
            <text:p>0.00</text:p>
          </table:table-cell>
          <table:table-cell table:style-name="ce294" table:formula="of:=+SUM([.R29:.R32])" office:value-type="float" office:value="302.4" calcext:value-type="float">
            <text:p>302.40</text:p>
          </table:table-cell>
          <table:table-cell table:style-name="ce302" table:formula="of:=+[.O33]+[.P33]+[.Q33]" office:value-type="float" office:value="0" calcext:value-type="float">
            <text:p>0.00</text:p>
          </table:table-cell>
          <table:table-cell table:number-columns-repeated="16365"/>
        </table:table-row>
        <table:table-row table:style-name="ro13">
          <table:table-cell table:number-columns-repeated="12"/>
          <table:table-cell table:style-name="ce296" office:value-type="string" calcext:value-type="string">
            <text:p>pago</text:p>
          </table:table-cell>
          <table:table-cell table:style-name="ce296" office:value-type="float" office:value="0" calcext:value-type="float">
            <text:p>0</text:p>
          </table:table-cell>
          <table:table-cell table:number-columns-repeated="3" table:style-name="ce299" office:value-type="float" office:value="0" calcext:value-type="float">
            <text:p>0.00</text:p>
          </table:table-cell>
          <table:table-cell table:style-name="ce299" office:value-type="float" office:value="84" calcext:value-type="float">
            <text:p>84.00</text:p>
          </table:table-cell>
          <table:table-cell table:style-name="ce302" table:formula="of:=+[.L33]-[.N33]-[.S33]" office:value-type="float" office:value="3732.3" calcext:value-type="float">
            <text:p>3732.30</text:p>
          </table:table-cell>
          <table:table-cell table:number-columns-repeated="16365"/>
        </table:table-row>
        <table:table-row table:style-name="ro13">
          <table:table-cell table:number-columns-repeated="12"/>
          <table:table-cell table:style-name="ce296" office:value-type="string" calcext:value-type="string">
            <text:p>saldo</text:p>
          </table:table-cell>
          <table:table-cell table:style-name="ce296" office:value-type="float" office:value="0" calcext:value-type="float">
            <text:p>0</text:p>
          </table:table-cell>
          <table:table-cell table:number-columns-repeated="4" table:style-name="ce299" office:value-type="float" office:value="0" calcext:value-type="float">
            <text:p>0.00</text:p>
          </table:table-cell>
          <table:table-cell table:number-columns-repeated="16366"/>
        </table:table-row>
        <table:table-row table:style-name="ro13" table:number-rows-repeated="2">
          <table:table-cell table:number-columns-repeated="16384"/>
        </table:table-row>
        <table:table-row table:style-name="ro13">
          <table:table-cell/>
          <table:table-cell table:style-name="ce286" office:value-type="string" calcext:value-type="string" table:number-columns-spanned="1" table:number-rows-spanned="2">
            <text:p>Perido</text:p>
          </table:table-cell>
          <table:table-cell table:style-name="ce286" office:value-type="string" calcext:value-type="string" table:number-columns-spanned="1" table:number-rows-spanned="2">
            <text:p>Nro</text:p>
          </table:table-cell>
          <table:table-cell table:style-name="ce286" office:value-type="string" calcext:value-type="string" table:number-columns-spanned="1" table:number-rows-spanned="2">
            <text:p>Nombre</text:p>
          </table:table-cell>
          <table:table-cell table:style-name="ce286" office:value-type="string" calcext:value-type="string" table:number-columns-spanned="1" table:number-rows-spanned="2">
            <text:p>Feha de Nac</text:p>
          </table:table-cell>
          <table:table-cell table:style-name="ce286" office:value-type="string" calcext:value-type="string" table:number-columns-spanned="1" table:number-rows-spanned="2">
            <text:p>dni</text:p>
          </table:table-cell>
          <table:table-cell table:style-name="ce286" office:value-type="string" calcext:value-type="string" table:number-columns-spanned="1" table:number-rows-spanned="2">
            <text:p>cussp</text:p>
          </table:table-cell>
          <table:table-cell table:style-name="ce286" office:value-type="string" calcext:value-type="string" table:number-columns-spanned="1" table:number-rows-spanned="2">
            <text:p>Remunerac.</text:p>
          </table:table-cell>
          <table:table-cell table:style-name="ce286" office:value-type="string" calcext:value-type="string" table:number-columns-spanned="1" table:number-rows-spanned="2">
            <text:p>Asignac. Fam.</text:p>
          </table:table-cell>
          <table:table-cell table:style-name="ce286" office:value-type="string" calcext:value-type="string" table:number-columns-spanned="1" table:number-rows-spanned="2">
            <text:p>Gratificación</text:p>
          </table:table-cell>
          <table:table-cell table:style-name="ce286" office:value-type="string" calcext:value-type="string" table:number-columns-spanned="1" table:number-rows-spanned="2">
            <text:p>Indemnizac.</text:p>
          </table:table-cell>
          <table:table-cell table:style-name="ce286" office:value-type="string" calcext:value-type="string" table:number-columns-spanned="1" table:number-rows-spanned="2">
            <text:p>Base imponible</text:p>
          </table:table-cell>
          <table:table-cell table:style-name="ce286" office:value-type="string" calcext:value-type="string" table:number-columns-spanned="1" table:number-rows-spanned="2">
            <text:p>Sistema de pensiones</text:p>
          </table:table-cell>
          <table:table-cell table:style-name="ce297" office:value-type="string" calcext:value-type="string">
            <text:p>ONP</text:p>
          </table:table-cell>
          <table:table-cell table:style-name="ce297" office:value-type="string" calcext:value-type="string">
            <text:p>aporte</text:p>
          </table:table-cell>
          <table:table-cell table:style-name="ce297" office:value-type="string" calcext:value-type="string">
            <text:p>prima</text:p>
          </table:table-cell>
          <table:table-cell table:style-name="ce297" office:value-type="string" calcext:value-type="string">
            <text:p>comision</text:p>
          </table:table-cell>
          <table:table-cell table:style-name="ce297" office:value-type="string" calcext:value-type="string">
            <text:p>esalud</text:p>
          </table:table-cell>
          <table:table-cell table:number-columns-repeated="16366"/>
        </table:table-row>
        <table:table-row table:style-name="ro13">
          <table:table-cell/>
          <table:covered-table-cell table:number-columns-repeated="12" table:style-name="ce287"/>
          <table:table-cell table:style-name="ce298" office:value-type="percentage" office:value="0.13" calcext:value-type="percentage">
            <text:p>13 %</text:p>
          </table:table-cell>
          <table:table-cell table:style-name="ce298" office:value-type="percentage" office:value="0.1" calcext:value-type="percentage">
            <text:p>10 %</text:p>
          </table:table-cell>
          <table:table-cell table:style-name="ce300" office:value-type="percentage" office:value="0.0133" calcext:value-type="percentage">
            <text:p>1.33 %</text:p>
          </table:table-cell>
          <table:table-cell table:style-name="ce300" office:value-type="percentage" office:value="0.0155" calcext:value-type="percentage">
            <text:p>1.55 %</text:p>
          </table:table-cell>
          <table:table-cell table:style-name="ce298" office:value-type="percentage" office:value="0.09" calcext:value-type="percentage">
            <text:p>9 %</text:p>
          </table:table-cell>
          <table:table-cell table:number-columns-repeated="16366"/>
        </table:table-row>
        <table:table-row table:style-name="ro13">
          <table:table-cell/>
          <table:table-cell table:style-name="ce288" office:value-type="date" office:date-value="2021-04-01" calcext:value-type="date" table:number-columns-spanned="1" table:number-rows-spanned="5">
            <text:p>abr-21</text:p>
          </table:table-cell>
          <table:table-cell table:style-name="ce291"/>
          <table:table-cell table:style-name="ce291" office:value-type="string" calcext:value-type="string">
            <text:p>GERENTE GENERAL </text:p>
          </table:table-cell>
          <table:table-cell table:style-name="ce292"/>
          <table:table-cell table:style-name="ce291" table:number-columns-repeated="2"/>
          <table:table-cell table:style-name="ce293" office:value-type="float" office:value="1500" calcext:value-type="float">
            <text:p>1,500.00</text:p>
          </table:table-cell>
          <table:table-cell table:style-name="ce293" table:number-columns-repeated="3"/>
          <table:table-cell table:style-name="ce293" table:formula="of:=+SUM([.H40:.K40])" office:value-type="float" office:value="1500" calcext:value-type="float">
            <text:p>1,500.00</text:p>
          </table:table-cell>
          <table:table-cell table:style-name="ce293"/>
          <table:table-cell table:style-name="ce293" table:formula="of:=+[.L40]*[.$N$6]" office:value-type="float" office:value="195" calcext:value-type="float">
            <text:p>195.00</text:p>
          </table:table-cell>
          <table:table-cell table:style-name="ce293" table:number-columns-repeated="3"/>
          <table:table-cell table:style-name="ce293" table:formula="of:=+[.L40]*[.$R$6]" office:value-type="float" office:value="135" calcext:value-type="float">
            <text:p>135.00</text:p>
          </table:table-cell>
          <table:table-cell table:number-columns-repeated="16366"/>
        </table:table-row>
        <table:table-row table:style-name="ro13">
          <table:table-cell/>
          <table:covered-table-cell table:style-name="ce289"/>
          <table:table-cell table:style-name="ce291"/>
          <table:table-cell table:style-name="ce291" office:value-type="string" calcext:value-type="string">
            <text:p>TRABAJADOR 1</text:p>
          </table:table-cell>
          <table:table-cell table:style-name="ce292"/>
          <table:table-cell table:style-name="ce291" table:number-columns-repeated="2"/>
          <table:table-cell table:style-name="ce293" office:value-type="float" office:value="930" calcext:value-type="float">
            <text:p>930.00</text:p>
          </table:table-cell>
          <table:table-cell table:style-name="ce293" table:number-columns-repeated="3"/>
          <table:table-cell table:style-name="ce293" table:formula="of:=+SUM([.H41:.K41])" office:value-type="float" office:value="930" calcext:value-type="float">
            <text:p>930.00</text:p>
          </table:table-cell>
          <table:table-cell table:style-name="ce293"/>
          <table:table-cell table:style-name="ce293" table:formula="of:=+[.L41]*[.$N$6]" office:value-type="float" office:value="120.9" calcext:value-type="float">
            <text:p>120.90</text:p>
          </table:table-cell>
          <table:table-cell table:style-name="ce293" table:number-columns-repeated="4"/>
          <table:table-cell table:number-columns-repeated="16366"/>
        </table:table-row>
        <table:table-row table:style-name="ro13">
          <table:table-cell/>
          <table:covered-table-cell table:style-name="ce289"/>
          <table:table-cell table:style-name="ce291"/>
          <table:table-cell table:style-name="ce291" office:value-type="string" calcext:value-type="string">
            <text:p>TRABAJADOR 2</text:p>
          </table:table-cell>
          <table:table-cell table:style-name="ce292"/>
          <table:table-cell table:style-name="ce291" table:number-columns-repeated="2"/>
          <table:table-cell table:style-name="ce293" office:value-type="float" office:value="930" calcext:value-type="float">
            <text:p>930.00</text:p>
          </table:table-cell>
          <table:table-cell table:style-name="ce293" table:number-columns-repeated="3"/>
          <table:table-cell table:style-name="ce293" table:formula="of:=+SUM([.H42:.K42])" office:value-type="float" office:value="930" calcext:value-type="float">
            <text:p>930.00</text:p>
          </table:table-cell>
          <table:table-cell table:style-name="ce293"/>
          <table:table-cell table:style-name="ce293" table:formula="of:=+[.L42]*[.$N$6]" office:value-type="float" office:value="120.9" calcext:value-type="float">
            <text:p>120.90</text:p>
          </table:table-cell>
          <table:table-cell table:style-name="ce293" table:number-columns-repeated="3"/>
          <table:table-cell table:style-name="ce293" table:formula="of:=+[.L42]*[.$R$6]" office:value-type="float" office:value="83.7" calcext:value-type="float">
            <text:p>83.70</text:p>
          </table:table-cell>
          <table:table-cell table:number-columns-repeated="16366"/>
        </table:table-row>
        <table:table-row table:style-name="ro13">
          <table:table-cell/>
          <table:covered-table-cell table:style-name="ce289"/>
          <table:table-cell table:style-name="ce291"/>
          <table:table-cell table:style-name="ce291" office:value-type="string" calcext:value-type="string">
            <text:p>TRABAJADOR 3</text:p>
          </table:table-cell>
          <table:table-cell table:style-name="ce292"/>
          <table:table-cell table:style-name="ce291" table:number-columns-repeated="2"/>
          <table:table-cell table:style-name="ce293" office:value-type="float" office:value="930" calcext:value-type="float">
            <text:p>930.00</text:p>
          </table:table-cell>
          <table:table-cell table:style-name="ce293" table:number-columns-repeated="3"/>
          <table:table-cell table:style-name="ce293" table:formula="of:=+SUM([.H43:.K43])" office:value-type="float" office:value="930" calcext:value-type="float">
            <text:p>930.00</text:p>
          </table:table-cell>
          <table:table-cell table:style-name="ce293"/>
          <table:table-cell table:style-name="ce293" table:formula="of:=+[.L43]*[.$N$6]" office:value-type="float" office:value="120.9" calcext:value-type="float">
            <text:p>120.90</text:p>
          </table:table-cell>
          <table:table-cell table:style-name="ce293" table:number-columns-repeated="3"/>
          <table:table-cell table:style-name="ce293" table:formula="of:=+[.L43]*[.$R$6]" office:value-type="float" office:value="83.7" calcext:value-type="float">
            <text:p>83.70</text:p>
          </table:table-cell>
          <table:table-cell table:number-columns-repeated="16366"/>
        </table:table-row>
        <table:table-row table:style-name="ro13">
          <table:table-cell/>
          <table:covered-table-cell table:style-name="ce290"/>
          <table:table-cell table:style-name="ce291" table:number-columns-repeated="2"/>
          <table:table-cell table:style-name="ce292"/>
          <table:table-cell table:style-name="ce291" table:number-columns-repeated="2"/>
          <table:table-cell table:style-name="ce294" table:formula="of:=+SUM([.H40:.H43])" office:value-type="float" office:value="4290" calcext:value-type="float">
            <text:p>4,290.00</text:p>
          </table:table-cell>
          <table:table-cell table:style-name="ce294" table:formula="of:=+SUM([.I40:.I43])" office:value-type="float" office:value="0" calcext:value-type="float">
            <text:p>0.00</text:p>
          </table:table-cell>
          <table:table-cell table:style-name="ce294" table:formula="of:=+SUM([.J40:.J43])" office:value-type="float" office:value="0" calcext:value-type="float">
            <text:p>0.00</text:p>
          </table:table-cell>
          <table:table-cell table:style-name="ce294" table:formula="of:=+SUM([.K40:.K43])" office:value-type="float" office:value="0" calcext:value-type="float">
            <text:p>0.00</text:p>
          </table:table-cell>
          <table:table-cell table:style-name="ce294" table:formula="of:=+SUM([.L40:.L43])" office:value-type="float" office:value="4290" calcext:value-type="float">
            <text:p>4,290.00</text:p>
          </table:table-cell>
          <table:table-cell table:style-name="ce294"/>
          <table:table-cell table:style-name="ce294" table:formula="of:=+SUM([.N40:.N43])" office:value-type="float" office:value="557.7" calcext:value-type="float">
            <text:p>557.70</text:p>
          </table:table-cell>
          <table:table-cell table:style-name="ce294" table:formula="of:=+SUM([.O40:.O43])" office:value-type="float" office:value="0" calcext:value-type="float">
            <text:p>0.00</text:p>
          </table:table-cell>
          <table:table-cell table:style-name="ce294" table:formula="of:=+SUM([.P40:.P43])" office:value-type="float" office:value="0" calcext:value-type="float">
            <text:p>0.00</text:p>
          </table:table-cell>
          <table:table-cell table:style-name="ce294" table:formula="of:=+SUM([.Q40:.Q43])" office:value-type="float" office:value="0" calcext:value-type="float">
            <text:p>0.00</text:p>
          </table:table-cell>
          <table:table-cell table:style-name="ce294" table:formula="of:=+SUM([.R40:.R43])" office:value-type="float" office:value="302.4" calcext:value-type="float">
            <text:p>302.40</text:p>
          </table:table-cell>
          <table:table-cell table:style-name="ce302" table:formula="of:=+[.O44]+[.P44]+[.Q44]" office:value-type="float" office:value="0" calcext:value-type="float">
            <text:p>0.00</text:p>
          </table:table-cell>
          <table:table-cell table:number-columns-repeated="16365"/>
        </table:table-row>
        <table:table-row table:style-name="ro13">
          <table:table-cell table:number-columns-repeated="12"/>
          <table:table-cell table:style-name="ce296" office:value-type="string" calcext:value-type="string">
            <text:p>pago</text:p>
          </table:table-cell>
          <table:table-cell table:style-name="ce296" office:value-type="float" office:value="0" calcext:value-type="float">
            <text:p>0</text:p>
          </table:table-cell>
          <table:table-cell table:number-columns-repeated="3" table:style-name="ce299" office:value-type="float" office:value="0" calcext:value-type="float">
            <text:p>0.00</text:p>
          </table:table-cell>
          <table:table-cell table:style-name="ce299" office:value-type="float" office:value="84" calcext:value-type="float">
            <text:p>84.00</text:p>
          </table:table-cell>
          <table:table-cell table:style-name="ce302" table:formula="of:=+[.L44]-[.N44]-[.S44]" office:value-type="float" office:value="3732.3" calcext:value-type="float">
            <text:p>3732.30</text:p>
          </table:table-cell>
          <table:table-cell table:number-columns-repeated="16365"/>
        </table:table-row>
        <table:table-row table:style-name="ro13">
          <table:table-cell table:number-columns-repeated="12"/>
          <table:table-cell table:style-name="ce296" office:value-type="string" calcext:value-type="string">
            <text:p>saldo</text:p>
          </table:table-cell>
          <table:table-cell table:style-name="ce296" office:value-type="float" office:value="0" calcext:value-type="float">
            <text:p>0</text:p>
          </table:table-cell>
          <table:table-cell table:number-columns-repeated="4" table:style-name="ce299" office:value-type="float" office:value="0" calcext:value-type="float">
            <text:p>0.00</text:p>
          </table:table-cell>
          <table:table-cell table:number-columns-repeated="16366"/>
        </table:table-row>
        <table:table-row table:style-name="ro13" table:number-rows-repeated="2">
          <table:table-cell table:number-columns-repeated="16384"/>
        </table:table-row>
        <table:table-row table:style-name="ro13">
          <table:table-cell/>
          <table:table-cell table:style-name="ce286" office:value-type="string" calcext:value-type="string" table:number-columns-spanned="1" table:number-rows-spanned="2">
            <text:p>Perido</text:p>
          </table:table-cell>
          <table:table-cell table:style-name="ce286" office:value-type="string" calcext:value-type="string" table:number-columns-spanned="1" table:number-rows-spanned="2">
            <text:p>Nro</text:p>
          </table:table-cell>
          <table:table-cell table:style-name="ce286" office:value-type="string" calcext:value-type="string" table:number-columns-spanned="1" table:number-rows-spanned="2">
            <text:p>Nombre</text:p>
          </table:table-cell>
          <table:table-cell table:style-name="ce286" office:value-type="string" calcext:value-type="string" table:number-columns-spanned="1" table:number-rows-spanned="2">
            <text:p>Feha de Nac</text:p>
          </table:table-cell>
          <table:table-cell table:style-name="ce286" office:value-type="string" calcext:value-type="string" table:number-columns-spanned="1" table:number-rows-spanned="2">
            <text:p>dni</text:p>
          </table:table-cell>
          <table:table-cell table:style-name="ce286" office:value-type="string" calcext:value-type="string" table:number-columns-spanned="1" table:number-rows-spanned="2">
            <text:p>cussp</text:p>
          </table:table-cell>
          <table:table-cell table:style-name="ce286" office:value-type="string" calcext:value-type="string" table:number-columns-spanned="1" table:number-rows-spanned="2">
            <text:p>Remunerac.</text:p>
          </table:table-cell>
          <table:table-cell table:style-name="ce286" office:value-type="string" calcext:value-type="string" table:number-columns-spanned="1" table:number-rows-spanned="2">
            <text:p>Asignac. Fam.</text:p>
          </table:table-cell>
          <table:table-cell table:style-name="ce286" office:value-type="string" calcext:value-type="string" table:number-columns-spanned="1" table:number-rows-spanned="2">
            <text:p>Gratificación</text:p>
          </table:table-cell>
          <table:table-cell table:style-name="ce286" office:value-type="string" calcext:value-type="string" table:number-columns-spanned="1" table:number-rows-spanned="2">
            <text:p>CST</text:p>
          </table:table-cell>
          <table:table-cell table:style-name="ce286" office:value-type="string" calcext:value-type="string" table:number-columns-spanned="1" table:number-rows-spanned="2">
            <text:p>Base imponible</text:p>
          </table:table-cell>
          <table:table-cell table:style-name="ce286" office:value-type="string" calcext:value-type="string" table:number-columns-spanned="1" table:number-rows-spanned="2">
            <text:p>Sistema de pensiones</text:p>
          </table:table-cell>
          <table:table-cell table:style-name="ce297" office:value-type="string" calcext:value-type="string">
            <text:p>ONP</text:p>
          </table:table-cell>
          <table:table-cell table:style-name="ce297" office:value-type="string" calcext:value-type="string">
            <text:p>aporte</text:p>
          </table:table-cell>
          <table:table-cell table:style-name="ce297" office:value-type="string" calcext:value-type="string">
            <text:p>prima</text:p>
          </table:table-cell>
          <table:table-cell table:style-name="ce297" office:value-type="string" calcext:value-type="string">
            <text:p>comision</text:p>
          </table:table-cell>
          <table:table-cell table:style-name="ce297" office:value-type="string" calcext:value-type="string">
            <text:p>esalud</text:p>
          </table:table-cell>
          <table:table-cell table:number-columns-repeated="16366"/>
        </table:table-row>
        <table:table-row table:style-name="ro13">
          <table:table-cell/>
          <table:covered-table-cell table:number-columns-repeated="12" table:style-name="ce287"/>
          <table:table-cell table:style-name="ce298" office:value-type="percentage" office:value="0.13" calcext:value-type="percentage">
            <text:p>13 %</text:p>
          </table:table-cell>
          <table:table-cell table:style-name="ce298" office:value-type="percentage" office:value="0.1" calcext:value-type="percentage">
            <text:p>10 %</text:p>
          </table:table-cell>
          <table:table-cell table:style-name="ce300" office:value-type="percentage" office:value="0.0133" calcext:value-type="percentage">
            <text:p>1.33 %</text:p>
          </table:table-cell>
          <table:table-cell table:style-name="ce300" office:value-type="percentage" office:value="0.0155" calcext:value-type="percentage">
            <text:p>1.55 %</text:p>
          </table:table-cell>
          <table:table-cell table:style-name="ce298" office:value-type="percentage" office:value="0.09" calcext:value-type="percentage">
            <text:p>9 %</text:p>
          </table:table-cell>
          <table:table-cell table:number-columns-repeated="16366"/>
        </table:table-row>
        <table:table-row table:style-name="ro13">
          <table:table-cell/>
          <table:table-cell table:style-name="ce288" office:value-type="date" office:date-value="2021-05-01" calcext:value-type="date" table:number-columns-spanned="1" table:number-rows-spanned="5">
            <text:p>may-21</text:p>
          </table:table-cell>
          <table:table-cell table:style-name="ce291"/>
          <table:table-cell table:style-name="ce291" office:value-type="string" calcext:value-type="string">
            <text:p>GERENTE GENERAL </text:p>
          </table:table-cell>
          <table:table-cell table:style-name="ce292"/>
          <table:table-cell table:style-name="ce291" table:number-columns-repeated="2"/>
          <table:table-cell table:style-name="ce293" office:value-type="float" office:value="1500" calcext:value-type="float">
            <text:p>1,500.00</text:p>
          </table:table-cell>
          <table:table-cell table:style-name="ce293" table:number-columns-repeated="2"/>
          <table:table-cell table:style-name="ce295" office:value-type="float" office:value="406.25" calcext:value-type="float">
            <text:p>406.25</text:p>
          </table:table-cell>
          <table:table-cell table:style-name="ce293" table:formula="of:=+SUM([.H51:.K51])" office:value-type="float" office:value="1906.25" calcext:value-type="float">
            <text:p>1,906.25</text:p>
          </table:table-cell>
          <table:table-cell table:style-name="ce293"/>
          <table:table-cell table:style-name="ce293" table:formula="of:=+[.L51]*[.$N$6]" office:value-type="float" office:value="247.8125" calcext:value-type="float">
            <text:p>247.81</text:p>
          </table:table-cell>
          <table:table-cell table:style-name="ce293" table:number-columns-repeated="3"/>
          <table:table-cell table:style-name="ce293" table:formula="of:=+[.L51]*[.$R$6]" office:value-type="float" office:value="171.5625" calcext:value-type="float">
            <text:p>171.56</text:p>
          </table:table-cell>
          <table:table-cell table:number-columns-repeated="16366"/>
        </table:table-row>
        <table:table-row table:style-name="ro13">
          <table:table-cell/>
          <table:covered-table-cell table:style-name="ce289"/>
          <table:table-cell table:style-name="ce291"/>
          <table:table-cell table:style-name="ce291" office:value-type="string" calcext:value-type="string">
            <text:p>TRABAJADOR 1</text:p>
          </table:table-cell>
          <table:table-cell table:style-name="ce292"/>
          <table:table-cell table:style-name="ce291" table:number-columns-repeated="2"/>
          <table:table-cell table:style-name="ce293" office:value-type="float" office:value="930" calcext:value-type="float">
            <text:p>930.00</text:p>
          </table:table-cell>
          <table:table-cell table:style-name="ce293" table:number-columns-repeated="2"/>
          <table:table-cell table:style-name="ce295" office:value-type="float" office:value="251.875" calcext:value-type="float">
            <text:p>251.88</text:p>
          </table:table-cell>
          <table:table-cell table:style-name="ce293" table:formula="of:=+SUM([.H52:.K52])" office:value-type="float" office:value="1181.875" calcext:value-type="float">
            <text:p>1,181.88</text:p>
          </table:table-cell>
          <table:table-cell table:style-name="ce293"/>
          <table:table-cell table:style-name="ce293" table:formula="of:=+[.L52]*[.$N$6]" office:value-type="float" office:value="153.64375" calcext:value-type="float">
            <text:p>153.64</text:p>
          </table:table-cell>
          <table:table-cell table:style-name="ce293" table:number-columns-repeated="4"/>
          <table:table-cell table:number-columns-repeated="16366"/>
        </table:table-row>
        <table:table-row table:style-name="ro13">
          <table:table-cell/>
          <table:covered-table-cell table:style-name="ce289"/>
          <table:table-cell table:style-name="ce291"/>
          <table:table-cell table:style-name="ce291" office:value-type="string" calcext:value-type="string">
            <text:p>TRABAJADOR 2</text:p>
          </table:table-cell>
          <table:table-cell table:style-name="ce292"/>
          <table:table-cell table:style-name="ce291" table:number-columns-repeated="2"/>
          <table:table-cell table:style-name="ce293" office:value-type="float" office:value="930" calcext:value-type="float">
            <text:p>930.00</text:p>
          </table:table-cell>
          <table:table-cell table:style-name="ce293" table:number-columns-repeated="2"/>
          <table:table-cell table:style-name="ce295" office:value-type="float" office:value="251.875" calcext:value-type="float">
            <text:p>251.88</text:p>
          </table:table-cell>
          <table:table-cell table:style-name="ce293" table:formula="of:=+SUM([.H53:.K53])" office:value-type="float" office:value="1181.875" calcext:value-type="float">
            <text:p>1,181.88</text:p>
          </table:table-cell>
          <table:table-cell table:style-name="ce293"/>
          <table:table-cell table:style-name="ce293" table:formula="of:=+[.L53]*[.$N$6]" office:value-type="float" office:value="153.64375" calcext:value-type="float">
            <text:p>153.64</text:p>
          </table:table-cell>
          <table:table-cell table:style-name="ce293" table:number-columns-repeated="3"/>
          <table:table-cell table:style-name="ce293" table:formula="of:=+[.L53]*[.$R$6]" office:value-type="float" office:value="106.36875" calcext:value-type="float">
            <text:p>106.37</text:p>
          </table:table-cell>
          <table:table-cell table:number-columns-repeated="16366"/>
        </table:table-row>
        <table:table-row table:style-name="ro13">
          <table:table-cell/>
          <table:covered-table-cell table:style-name="ce289"/>
          <table:table-cell table:style-name="ce291"/>
          <table:table-cell table:style-name="ce291" office:value-type="string" calcext:value-type="string">
            <text:p>TRABAJADOR 3</text:p>
          </table:table-cell>
          <table:table-cell table:style-name="ce292"/>
          <table:table-cell table:style-name="ce291" table:number-columns-repeated="2"/>
          <table:table-cell table:style-name="ce293" office:value-type="float" office:value="930" calcext:value-type="float">
            <text:p>930.00</text:p>
          </table:table-cell>
          <table:table-cell table:style-name="ce293" table:number-columns-repeated="2"/>
          <table:table-cell table:style-name="ce295" office:value-type="float" office:value="251.875" calcext:value-type="float">
            <text:p>251.88</text:p>
          </table:table-cell>
          <table:table-cell table:style-name="ce293" table:formula="of:=+SUM([.H54:.K54])" office:value-type="float" office:value="1181.875" calcext:value-type="float">
            <text:p>1,181.88</text:p>
          </table:table-cell>
          <table:table-cell table:style-name="ce293"/>
          <table:table-cell table:style-name="ce293" table:formula="of:=+[.L54]*[.$N$6]" office:value-type="float" office:value="153.64375" calcext:value-type="float">
            <text:p>153.64</text:p>
          </table:table-cell>
          <table:table-cell table:style-name="ce293" table:number-columns-repeated="3"/>
          <table:table-cell table:style-name="ce293" table:formula="of:=+[.L54]*[.$R$6]" office:value-type="float" office:value="106.36875" calcext:value-type="float">
            <text:p>106.37</text:p>
          </table:table-cell>
          <table:table-cell table:number-columns-repeated="16366"/>
        </table:table-row>
        <table:table-row table:style-name="ro13">
          <table:table-cell/>
          <table:covered-table-cell table:style-name="ce290"/>
          <table:table-cell table:style-name="ce291" table:number-columns-repeated="2"/>
          <table:table-cell table:style-name="ce292"/>
          <table:table-cell table:style-name="ce291" table:number-columns-repeated="2"/>
          <table:table-cell table:style-name="ce294" table:formula="of:=+SUM([.H51:.H54])" office:value-type="float" office:value="4290" calcext:value-type="float">
            <text:p>4,290.00</text:p>
          </table:table-cell>
          <table:table-cell table:style-name="ce294" table:formula="of:=+SUM([.I51:.I54])" office:value-type="float" office:value="0" calcext:value-type="float">
            <text:p>0.00</text:p>
          </table:table-cell>
          <table:table-cell table:style-name="ce294" table:formula="of:=+SUM([.J51:.J54])" office:value-type="float" office:value="0" calcext:value-type="float">
            <text:p>0.00</text:p>
          </table:table-cell>
          <table:table-cell table:style-name="ce294" table:formula="of:=+SUM([.K51:.K54])" office:value-type="float" office:value="1161.875" calcext:value-type="float">
            <text:p>1,161.88</text:p>
          </table:table-cell>
          <table:table-cell table:style-name="ce294" table:formula="of:=+SUM([.L51:.L54])" office:value-type="float" office:value="5451.875" calcext:value-type="float">
            <text:p>5,451.88</text:p>
          </table:table-cell>
          <table:table-cell table:style-name="ce294"/>
          <table:table-cell table:style-name="ce294" table:formula="of:=+SUM([.N51:.N54])" office:value-type="float" office:value="708.74375" calcext:value-type="float">
            <text:p>708.74</text:p>
          </table:table-cell>
          <table:table-cell table:style-name="ce294" table:formula="of:=+SUM([.O51:.O54])" office:value-type="float" office:value="0" calcext:value-type="float">
            <text:p>0.00</text:p>
          </table:table-cell>
          <table:table-cell table:style-name="ce294" table:formula="of:=+SUM([.P51:.P54])" office:value-type="float" office:value="0" calcext:value-type="float">
            <text:p>0.00</text:p>
          </table:table-cell>
          <table:table-cell table:style-name="ce294" table:formula="of:=+SUM([.Q51:.Q54])" office:value-type="float" office:value="0" calcext:value-type="float">
            <text:p>0.00</text:p>
          </table:table-cell>
          <table:table-cell table:style-name="ce294" table:formula="of:=+SUM([.R51:.R54])" office:value-type="float" office:value="384.3" calcext:value-type="float">
            <text:p>384.30</text:p>
          </table:table-cell>
          <table:table-cell table:style-name="ce302" table:formula="of:=+[.O55]+[.P55]+[.Q5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3">
          <table:table-cell table:number-columns-repeated="12"/>
          <table:table-cell table:style-name="ce296" office:value-type="string" calcext:value-type="string">
            <text:p>pago</text:p>
          </table:table-cell>
          <table:table-cell table:style-name="ce296" office:value-type="float" office:value="0" calcext:value-type="float">
            <text:p>0</text:p>
          </table:table-cell>
          <table:table-cell table:number-columns-repeated="3" table:style-name="ce299" office:value-type="float" office:value="0" calcext:value-type="float">
            <text:p>0.00</text:p>
          </table:table-cell>
          <table:table-cell table:style-name="ce299" office:value-type="float" office:value="84" calcext:value-type="float">
            <text:p>84.00</text:p>
          </table:table-cell>
          <table:table-cell table:style-name="ce302" table:formula="of:=+[.L55]-[.N55]-[.S55]" office:value-type="float" office:value="4743.13125" calcext:value-type="float">
            <text:p>4743.13</text:p>
          </table:table-cell>
          <table:table-cell table:number-columns-repeated="16365"/>
        </table:table-row>
        <table:table-row table:style-name="ro13">
          <table:table-cell table:number-columns-repeated="12"/>
          <table:table-cell table:style-name="ce296" office:value-type="string" calcext:value-type="string">
            <text:p>saldo</text:p>
          </table:table-cell>
          <table:table-cell table:style-name="ce296" office:value-type="float" office:value="0" calcext:value-type="float">
            <text:p>0</text:p>
          </table:table-cell>
          <table:table-cell table:number-columns-repeated="4" table:style-name="ce299" office:value-type="float" office:value="0" calcext:value-type="float">
            <text:p>0.00</text:p>
          </table:table-cell>
          <table:table-cell table:number-columns-repeated="16366"/>
        </table:table-row>
        <table:table-row table:style-name="ro13" table:number-rows-repeated="2">
          <table:table-cell table:number-columns-repeated="16384"/>
        </table:table-row>
        <table:table-row table:style-name="ro13">
          <table:table-cell/>
          <table:table-cell table:style-name="ce286" office:value-type="string" calcext:value-type="string" table:number-columns-spanned="1" table:number-rows-spanned="2">
            <text:p>Perido</text:p>
          </table:table-cell>
          <table:table-cell table:style-name="ce286" office:value-type="string" calcext:value-type="string" table:number-columns-spanned="1" table:number-rows-spanned="2">
            <text:p>Nro</text:p>
          </table:table-cell>
          <table:table-cell table:style-name="ce286" office:value-type="string" calcext:value-type="string" table:number-columns-spanned="1" table:number-rows-spanned="2">
            <text:p>Nombre</text:p>
          </table:table-cell>
          <table:table-cell table:style-name="ce286" office:value-type="string" calcext:value-type="string" table:number-columns-spanned="1" table:number-rows-spanned="2">
            <text:p>Feha de Nac</text:p>
          </table:table-cell>
          <table:table-cell table:style-name="ce286" office:value-type="string" calcext:value-type="string" table:number-columns-spanned="1" table:number-rows-spanned="2">
            <text:p>dni</text:p>
          </table:table-cell>
          <table:table-cell table:style-name="ce286" office:value-type="string" calcext:value-type="string" table:number-columns-spanned="1" table:number-rows-spanned="2">
            <text:p>cussp</text:p>
          </table:table-cell>
          <table:table-cell table:style-name="ce286" office:value-type="string" calcext:value-type="string" table:number-columns-spanned="1" table:number-rows-spanned="2">
            <text:p>Remunerac.</text:p>
          </table:table-cell>
          <table:table-cell table:style-name="ce286" office:value-type="string" calcext:value-type="string" table:number-columns-spanned="1" table:number-rows-spanned="2">
            <text:p>Asignac. Fam.</text:p>
          </table:table-cell>
          <table:table-cell table:style-name="ce286" office:value-type="string" calcext:value-type="string" table:number-columns-spanned="1" table:number-rows-spanned="2">
            <text:p>Gratificación</text:p>
          </table:table-cell>
          <table:table-cell table:style-name="ce286" office:value-type="string" calcext:value-type="string" table:number-columns-spanned="1" table:number-rows-spanned="2">
            <text:p>Indemnizac.</text:p>
          </table:table-cell>
          <table:table-cell table:style-name="ce286" office:value-type="string" calcext:value-type="string" table:number-columns-spanned="1" table:number-rows-spanned="2">
            <text:p>Base imponible</text:p>
          </table:table-cell>
          <table:table-cell table:style-name="ce286" office:value-type="string" calcext:value-type="string" table:number-columns-spanned="1" table:number-rows-spanned="2">
            <text:p>Sistema de pensiones</text:p>
          </table:table-cell>
          <table:table-cell table:style-name="ce297" office:value-type="string" calcext:value-type="string">
            <text:p>ONP</text:p>
          </table:table-cell>
          <table:table-cell table:style-name="ce297" office:value-type="string" calcext:value-type="string">
            <text:p>aporte</text:p>
          </table:table-cell>
          <table:table-cell table:style-name="ce297" office:value-type="string" calcext:value-type="string">
            <text:p>prima</text:p>
          </table:table-cell>
          <table:table-cell table:style-name="ce297" office:value-type="string" calcext:value-type="string">
            <text:p>comision</text:p>
          </table:table-cell>
          <table:table-cell table:style-name="ce297" office:value-type="string" calcext:value-type="string">
            <text:p>esalud</text:p>
          </table:table-cell>
          <table:table-cell table:number-columns-repeated="16366"/>
        </table:table-row>
        <table:table-row table:style-name="ro13">
          <table:table-cell/>
          <table:covered-table-cell table:number-columns-repeated="12" table:style-name="ce287"/>
          <table:table-cell table:style-name="ce298" office:value-type="percentage" office:value="0.13" calcext:value-type="percentage">
            <text:p>13 %</text:p>
          </table:table-cell>
          <table:table-cell table:style-name="ce298" office:value-type="percentage" office:value="0.1" calcext:value-type="percentage">
            <text:p>10 %</text:p>
          </table:table-cell>
          <table:table-cell table:style-name="ce300" office:value-type="percentage" office:value="0.0133" calcext:value-type="percentage">
            <text:p>1.33 %</text:p>
          </table:table-cell>
          <table:table-cell table:style-name="ce300" office:value-type="percentage" office:value="0.0155" calcext:value-type="percentage">
            <text:p>1.55 %</text:p>
          </table:table-cell>
          <table:table-cell table:style-name="ce298" office:value-type="percentage" office:value="0.09" calcext:value-type="percentage">
            <text:p>9 %</text:p>
          </table:table-cell>
          <table:table-cell table:number-columns-repeated="16366"/>
        </table:table-row>
        <table:table-row table:style-name="ro13">
          <table:table-cell/>
          <table:table-cell table:style-name="ce288" office:value-type="date" office:date-value="2021-06-01" calcext:value-type="date" table:number-columns-spanned="1" table:number-rows-spanned="5">
            <text:p>jun-21</text:p>
          </table:table-cell>
          <table:table-cell table:style-name="ce291"/>
          <table:table-cell table:style-name="ce291" office:value-type="string" calcext:value-type="string">
            <text:p>GERENTE GENERAL </text:p>
          </table:table-cell>
          <table:table-cell table:style-name="ce292"/>
          <table:table-cell table:style-name="ce291" table:number-columns-repeated="2"/>
          <table:table-cell table:style-name="ce293" office:value-type="float" office:value="1500" calcext:value-type="float">
            <text:p>1,500.00</text:p>
          </table:table-cell>
          <table:table-cell table:style-name="ce293" table:number-columns-repeated="3"/>
          <table:table-cell table:style-name="ce293" table:formula="of:=+SUM([.H62:.K62])" office:value-type="float" office:value="1500" calcext:value-type="float">
            <text:p>1,500.00</text:p>
          </table:table-cell>
          <table:table-cell table:style-name="ce293"/>
          <table:table-cell table:style-name="ce293" table:formula="of:=+[.L62]*[.$N$6]" office:value-type="float" office:value="195" calcext:value-type="float">
            <text:p>195.00</text:p>
          </table:table-cell>
          <table:table-cell table:style-name="ce293" table:number-columns-repeated="3"/>
          <table:table-cell table:style-name="ce293" table:formula="of:=+[.L62]*[.$R$6]" office:value-type="float" office:value="135" calcext:value-type="float">
            <text:p>135.00</text:p>
          </table:table-cell>
          <table:table-cell table:number-columns-repeated="16366"/>
        </table:table-row>
        <table:table-row table:style-name="ro13">
          <table:table-cell/>
          <table:covered-table-cell table:style-name="ce289"/>
          <table:table-cell table:style-name="ce291"/>
          <table:table-cell table:style-name="ce291" office:value-type="string" calcext:value-type="string">
            <text:p>TRABAJADOR 1</text:p>
          </table:table-cell>
          <table:table-cell table:style-name="ce292"/>
          <table:table-cell table:style-name="ce291" table:number-columns-repeated="2"/>
          <table:table-cell table:style-name="ce293" office:value-type="float" office:value="930" calcext:value-type="float">
            <text:p>930.00</text:p>
          </table:table-cell>
          <table:table-cell table:style-name="ce293" table:number-columns-repeated="3"/>
          <table:table-cell table:style-name="ce293" table:formula="of:=+SUM([.H63:.K63])" office:value-type="float" office:value="930" calcext:value-type="float">
            <text:p>930.00</text:p>
          </table:table-cell>
          <table:table-cell table:style-name="ce293"/>
          <table:table-cell table:style-name="ce293" table:formula="of:=+[.L63]*[.$N$6]" office:value-type="float" office:value="120.9" calcext:value-type="float">
            <text:p>120.90</text:p>
          </table:table-cell>
          <table:table-cell table:style-name="ce293" table:number-columns-repeated="4"/>
          <table:table-cell table:number-columns-repeated="16366"/>
        </table:table-row>
        <table:table-row table:style-name="ro13">
          <table:table-cell/>
          <table:covered-table-cell table:style-name="ce289"/>
          <table:table-cell table:style-name="ce291"/>
          <table:table-cell table:style-name="ce291" office:value-type="string" calcext:value-type="string">
            <text:p>TRABAJADOR 2</text:p>
          </table:table-cell>
          <table:table-cell table:style-name="ce292"/>
          <table:table-cell table:style-name="ce291" table:number-columns-repeated="2"/>
          <table:table-cell table:style-name="ce293" office:value-type="float" office:value="930" calcext:value-type="float">
            <text:p>930.00</text:p>
          </table:table-cell>
          <table:table-cell table:style-name="ce293" table:number-columns-repeated="3"/>
          <table:table-cell table:style-name="ce293" table:formula="of:=+SUM([.H64:.K64])" office:value-type="float" office:value="930" calcext:value-type="float">
            <text:p>930.00</text:p>
          </table:table-cell>
          <table:table-cell table:style-name="ce293"/>
          <table:table-cell table:style-name="ce293" table:formula="of:=+[.L64]*[.$N$6]" office:value-type="float" office:value="120.9" calcext:value-type="float">
            <text:p>120.90</text:p>
          </table:table-cell>
          <table:table-cell table:style-name="ce293" table:number-columns-repeated="3"/>
          <table:table-cell table:style-name="ce293" table:formula="of:=+[.L64]*[.$R$6]" office:value-type="float" office:value="83.7" calcext:value-type="float">
            <text:p>83.70</text:p>
          </table:table-cell>
          <table:table-cell table:number-columns-repeated="16366"/>
        </table:table-row>
        <table:table-row table:style-name="ro13">
          <table:table-cell/>
          <table:covered-table-cell table:style-name="ce289"/>
          <table:table-cell table:style-name="ce291"/>
          <table:table-cell table:style-name="ce291" office:value-type="string" calcext:value-type="string">
            <text:p>TRABAJADOR 3</text:p>
          </table:table-cell>
          <table:table-cell table:style-name="ce292"/>
          <table:table-cell table:style-name="ce291" table:number-columns-repeated="2"/>
          <table:table-cell table:style-name="ce293" office:value-type="float" office:value="930" calcext:value-type="float">
            <text:p>930.00</text:p>
          </table:table-cell>
          <table:table-cell table:style-name="ce293" table:number-columns-repeated="3"/>
          <table:table-cell table:style-name="ce293" table:formula="of:=+SUM([.H65:.K65])" office:value-type="float" office:value="930" calcext:value-type="float">
            <text:p>930.00</text:p>
          </table:table-cell>
          <table:table-cell table:style-name="ce293"/>
          <table:table-cell table:style-name="ce293" table:formula="of:=+[.L65]*[.$N$6]" office:value-type="float" office:value="120.9" calcext:value-type="float">
            <text:p>120.90</text:p>
          </table:table-cell>
          <table:table-cell table:style-name="ce293" table:number-columns-repeated="3"/>
          <table:table-cell table:style-name="ce293" table:formula="of:=+[.L65]*[.$R$6]" office:value-type="float" office:value="83.7" calcext:value-type="float">
            <text:p>83.70</text:p>
          </table:table-cell>
          <table:table-cell table:number-columns-repeated="16366"/>
        </table:table-row>
        <table:table-row table:style-name="ro13">
          <table:table-cell/>
          <table:covered-table-cell table:style-name="ce290"/>
          <table:table-cell table:style-name="ce291" table:number-columns-repeated="2"/>
          <table:table-cell table:style-name="ce292"/>
          <table:table-cell table:style-name="ce291" table:number-columns-repeated="2"/>
          <table:table-cell table:style-name="ce294" table:formula="of:=+SUM([.H62:.H65])" office:value-type="float" office:value="4290" calcext:value-type="float">
            <text:p>4,290.00</text:p>
          </table:table-cell>
          <table:table-cell table:style-name="ce294" table:formula="of:=+SUM([.I62:.I65])" office:value-type="float" office:value="0" calcext:value-type="float">
            <text:p>0.00</text:p>
          </table:table-cell>
          <table:table-cell table:style-name="ce294" table:formula="of:=+SUM([.J62:.J65])" office:value-type="float" office:value="0" calcext:value-type="float">
            <text:p>0.00</text:p>
          </table:table-cell>
          <table:table-cell table:style-name="ce294" table:formula="of:=+SUM([.K62:.K65])" office:value-type="float" office:value="0" calcext:value-type="float">
            <text:p>0.00</text:p>
          </table:table-cell>
          <table:table-cell table:style-name="ce294" table:formula="of:=+SUM([.L62:.L65])" office:value-type="float" office:value="4290" calcext:value-type="float">
            <text:p>4,290.00</text:p>
          </table:table-cell>
          <table:table-cell table:style-name="ce294"/>
          <table:table-cell table:style-name="ce294" table:formula="of:=+SUM([.N62:.N65])" office:value-type="float" office:value="557.7" calcext:value-type="float">
            <text:p>557.70</text:p>
          </table:table-cell>
          <table:table-cell table:style-name="ce294" table:formula="of:=+SUM([.O62:.O65])" office:value-type="float" office:value="0" calcext:value-type="float">
            <text:p>0.00</text:p>
          </table:table-cell>
          <table:table-cell table:style-name="ce294" table:formula="of:=+SUM([.P62:.P65])" office:value-type="float" office:value="0" calcext:value-type="float">
            <text:p>0.00</text:p>
          </table:table-cell>
          <table:table-cell table:style-name="ce294" table:formula="of:=+SUM([.Q62:.Q65])" office:value-type="float" office:value="0" calcext:value-type="float">
            <text:p>0.00</text:p>
          </table:table-cell>
          <table:table-cell table:style-name="ce294" table:formula="of:=+SUM([.R62:.R65])" office:value-type="float" office:value="302.4" calcext:value-type="float">
            <text:p>302.40</text:p>
          </table:table-cell>
          <table:table-cell table:style-name="ce302" table:formula="of:=+[.O66]+[.P66]+[.Q6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3">
          <table:table-cell table:number-columns-repeated="12"/>
          <table:table-cell table:style-name="ce296" office:value-type="string" calcext:value-type="string">
            <text:p>pago</text:p>
          </table:table-cell>
          <table:table-cell table:style-name="ce296" office:value-type="float" office:value="0" calcext:value-type="float">
            <text:p>0</text:p>
          </table:table-cell>
          <table:table-cell table:number-columns-repeated="3" table:style-name="ce299" office:value-type="float" office:value="0" calcext:value-type="float">
            <text:p>0.00</text:p>
          </table:table-cell>
          <table:table-cell table:style-name="ce299" office:value-type="float" office:value="84" calcext:value-type="float">
            <text:p>84.00</text:p>
          </table:table-cell>
          <table:table-cell table:style-name="ce302" table:formula="of:=+[.L66]-[.N66]-[.S66]" office:value-type="float" office:value="3732.3" calcext:value-type="float">
            <text:p>3732.30</text:p>
          </table:table-cell>
          <table:table-cell table:number-columns-repeated="16365"/>
        </table:table-row>
        <table:table-row table:style-name="ro13">
          <table:table-cell table:number-columns-repeated="12"/>
          <table:table-cell table:style-name="ce296" office:value-type="string" calcext:value-type="string">
            <text:p>saldo</text:p>
          </table:table-cell>
          <table:table-cell table:style-name="ce296" office:value-type="float" office:value="0" calcext:value-type="float">
            <text:p>0</text:p>
          </table:table-cell>
          <table:table-cell table:number-columns-repeated="4" table:style-name="ce299" office:value-type="float" office:value="0" calcext:value-type="float">
            <text:p>0.00</text:p>
          </table:table-cell>
          <table:table-cell table:number-columns-repeated="16366"/>
        </table:table-row>
        <table:table-row table:style-name="ro13" table:number-rows-repeated="2">
          <table:table-cell table:number-columns-repeated="16384"/>
        </table:table-row>
        <table:table-row table:style-name="ro13">
          <table:table-cell/>
          <table:table-cell table:style-name="ce286" office:value-type="string" calcext:value-type="string" table:number-columns-spanned="1" table:number-rows-spanned="2">
            <text:p>Perido</text:p>
          </table:table-cell>
          <table:table-cell table:style-name="ce286" office:value-type="string" calcext:value-type="string" table:number-columns-spanned="1" table:number-rows-spanned="2">
            <text:p>Nro</text:p>
          </table:table-cell>
          <table:table-cell table:style-name="ce286" office:value-type="string" calcext:value-type="string" table:number-columns-spanned="1" table:number-rows-spanned="2">
            <text:p>Nombre</text:p>
          </table:table-cell>
          <table:table-cell table:style-name="ce286" office:value-type="string" calcext:value-type="string" table:number-columns-spanned="1" table:number-rows-spanned="2">
            <text:p>Feha de Nac</text:p>
          </table:table-cell>
          <table:table-cell table:style-name="ce286" office:value-type="string" calcext:value-type="string" table:number-columns-spanned="1" table:number-rows-spanned="2">
            <text:p>dni</text:p>
          </table:table-cell>
          <table:table-cell table:style-name="ce286" office:value-type="string" calcext:value-type="string" table:number-columns-spanned="1" table:number-rows-spanned="2">
            <text:p>cussp</text:p>
          </table:table-cell>
          <table:table-cell table:style-name="ce286" office:value-type="string" calcext:value-type="string" table:number-columns-spanned="1" table:number-rows-spanned="2">
            <text:p>Remunerac.</text:p>
          </table:table-cell>
          <table:table-cell table:style-name="ce286" office:value-type="string" calcext:value-type="string" table:number-columns-spanned="1" table:number-rows-spanned="2">
            <text:p>Asignac. Fam.</text:p>
          </table:table-cell>
          <table:table-cell table:style-name="ce286" office:value-type="string" calcext:value-type="string" table:number-columns-spanned="1" table:number-rows-spanned="2">
            <text:p>Gratificación</text:p>
          </table:table-cell>
          <table:table-cell table:style-name="ce286" office:value-type="string" calcext:value-type="string" table:number-columns-spanned="1" table:number-rows-spanned="2">
            <text:p>Indemnizac.</text:p>
          </table:table-cell>
          <table:table-cell table:style-name="ce286" office:value-type="string" calcext:value-type="string" table:number-columns-spanned="1" table:number-rows-spanned="2">
            <text:p>Base imponible</text:p>
          </table:table-cell>
          <table:table-cell table:style-name="ce286" office:value-type="string" calcext:value-type="string" table:number-columns-spanned="1" table:number-rows-spanned="2">
            <text:p>Sistema de pensiones</text:p>
          </table:table-cell>
          <table:table-cell table:style-name="ce297" office:value-type="string" calcext:value-type="string">
            <text:p>ONP</text:p>
          </table:table-cell>
          <table:table-cell table:style-name="ce297" office:value-type="string" calcext:value-type="string">
            <text:p>aporte</text:p>
          </table:table-cell>
          <table:table-cell table:style-name="ce297" office:value-type="string" calcext:value-type="string">
            <text:p>prima</text:p>
          </table:table-cell>
          <table:table-cell table:style-name="ce297" office:value-type="string" calcext:value-type="string">
            <text:p>comision</text:p>
          </table:table-cell>
          <table:table-cell table:style-name="ce297" office:value-type="string" calcext:value-type="string">
            <text:p>esalud</text:p>
          </table:table-cell>
          <table:table-cell table:number-columns-repeated="16366"/>
        </table:table-row>
        <table:table-row table:style-name="ro13">
          <table:table-cell/>
          <table:covered-table-cell table:number-columns-repeated="12" table:style-name="ce287"/>
          <table:table-cell table:style-name="ce298" office:value-type="percentage" office:value="0.13" calcext:value-type="percentage">
            <text:p>13 %</text:p>
          </table:table-cell>
          <table:table-cell table:style-name="ce298" office:value-type="percentage" office:value="0.1" calcext:value-type="percentage">
            <text:p>10 %</text:p>
          </table:table-cell>
          <table:table-cell table:style-name="ce300" office:value-type="percentage" office:value="0.0133" calcext:value-type="percentage">
            <text:p>1.33 %</text:p>
          </table:table-cell>
          <table:table-cell table:style-name="ce300" office:value-type="percentage" office:value="0.0155" calcext:value-type="percentage">
            <text:p>1.55 %</text:p>
          </table:table-cell>
          <table:table-cell table:style-name="ce298" office:value-type="percentage" office:value="0.09" calcext:value-type="percentage">
            <text:p>9 %</text:p>
          </table:table-cell>
          <table:table-cell table:number-columns-repeated="16366"/>
        </table:table-row>
        <table:table-row table:style-name="ro13">
          <table:table-cell/>
          <table:table-cell table:style-name="ce288" office:value-type="date" office:date-value="2021-07-01" calcext:value-type="date" table:number-columns-spanned="1" table:number-rows-spanned="5">
            <text:p>jul-21</text:p>
          </table:table-cell>
          <table:table-cell table:style-name="ce291"/>
          <table:table-cell table:style-name="ce291" office:value-type="string" calcext:value-type="string">
            <text:p>GERENTE GENERAL </text:p>
          </table:table-cell>
          <table:table-cell table:style-name="ce292"/>
          <table:table-cell table:style-name="ce291" table:number-columns-repeated="2"/>
          <table:table-cell table:style-name="ce293" office:value-type="float" office:value="1500" calcext:value-type="float">
            <text:p>1,500.00</text:p>
          </table:table-cell>
          <table:table-cell table:style-name="ce293"/>
          <table:table-cell table:style-name="ce293" table:formula="of:=+[.H73]/2" office:value-type="float" office:value="750" calcext:value-type="float">
            <text:p>750.00</text:p>
          </table:table-cell>
          <table:table-cell table:style-name="ce293"/>
          <table:table-cell table:style-name="ce293" table:formula="of:=+SUM([.H73:.K73])" office:value-type="float" office:value="2250" calcext:value-type="float">
            <text:p>2,250.00</text:p>
          </table:table-cell>
          <table:table-cell table:style-name="ce293"/>
          <table:table-cell table:style-name="ce293" table:formula="of:=+[.L73]*[.$N$6]" office:value-type="float" office:value="292.5" calcext:value-type="float">
            <text:p>292.50</text:p>
          </table:table-cell>
          <table:table-cell table:style-name="ce293" table:number-columns-repeated="3"/>
          <table:table-cell table:style-name="ce293" table:formula="of:=+[.L73]*[.$R$6]" office:value-type="float" office:value="202.5" calcext:value-type="float">
            <text:p>202.50</text:p>
          </table:table-cell>
          <table:table-cell table:number-columns-repeated="16366"/>
        </table:table-row>
        <table:table-row table:style-name="ro13">
          <table:table-cell/>
          <table:covered-table-cell table:style-name="ce289"/>
          <table:table-cell table:style-name="ce291"/>
          <table:table-cell table:style-name="ce291" office:value-type="string" calcext:value-type="string">
            <text:p>TRABAJADOR 1</text:p>
          </table:table-cell>
          <table:table-cell table:style-name="ce292"/>
          <table:table-cell table:style-name="ce291" table:number-columns-repeated="2"/>
          <table:table-cell table:style-name="ce293" office:value-type="float" office:value="930" calcext:value-type="float">
            <text:p>930.00</text:p>
          </table:table-cell>
          <table:table-cell table:style-name="ce293"/>
          <table:table-cell table:style-name="ce293" table:formula="of:=+[.H74]/2" office:value-type="float" office:value="465" calcext:value-type="float">
            <text:p>465.00</text:p>
          </table:table-cell>
          <table:table-cell table:style-name="ce293"/>
          <table:table-cell table:style-name="ce293" table:formula="of:=+SUM([.H74:.K74])" office:value-type="float" office:value="1395" calcext:value-type="float">
            <text:p>1,395.00</text:p>
          </table:table-cell>
          <table:table-cell table:style-name="ce293"/>
          <table:table-cell table:style-name="ce293" table:formula="of:=+[.L74]*[.$N$6]" office:value-type="float" office:value="181.35" calcext:value-type="float">
            <text:p>181.35</text:p>
          </table:table-cell>
          <table:table-cell table:style-name="ce293" table:number-columns-repeated="4"/>
          <table:table-cell table:number-columns-repeated="16366"/>
        </table:table-row>
        <table:table-row table:style-name="ro13">
          <table:table-cell/>
          <table:covered-table-cell table:style-name="ce289"/>
          <table:table-cell table:style-name="ce291"/>
          <table:table-cell table:style-name="ce291" office:value-type="string" calcext:value-type="string">
            <text:p>TRABAJADOR 2</text:p>
          </table:table-cell>
          <table:table-cell table:style-name="ce292"/>
          <table:table-cell table:style-name="ce291" table:number-columns-repeated="2"/>
          <table:table-cell table:style-name="ce293" office:value-type="float" office:value="930" calcext:value-type="float">
            <text:p>930.00</text:p>
          </table:table-cell>
          <table:table-cell table:style-name="ce293"/>
          <table:table-cell table:style-name="ce293" table:formula="of:=+[.H75]/2" office:value-type="float" office:value="465" calcext:value-type="float">
            <text:p>465.00</text:p>
          </table:table-cell>
          <table:table-cell table:style-name="ce293"/>
          <table:table-cell table:style-name="ce293" table:formula="of:=+SUM([.H75:.K75])" office:value-type="float" office:value="1395" calcext:value-type="float">
            <text:p>1,395.00</text:p>
          </table:table-cell>
          <table:table-cell table:style-name="ce293"/>
          <table:table-cell table:style-name="ce293" table:formula="of:=+[.L75]*[.$N$6]" office:value-type="float" office:value="181.35" calcext:value-type="float">
            <text:p>181.35</text:p>
          </table:table-cell>
          <table:table-cell table:style-name="ce293" table:number-columns-repeated="3"/>
          <table:table-cell table:style-name="ce293" table:formula="of:=+[.L75]*[.$R$6]" office:value-type="float" office:value="125.55" calcext:value-type="float">
            <text:p>125.55</text:p>
          </table:table-cell>
          <table:table-cell table:number-columns-repeated="16366"/>
        </table:table-row>
        <table:table-row table:style-name="ro13">
          <table:table-cell/>
          <table:covered-table-cell table:style-name="ce289"/>
          <table:table-cell table:style-name="ce291"/>
          <table:table-cell table:style-name="ce291" office:value-type="string" calcext:value-type="string">
            <text:p>TRABAJADOR 3</text:p>
          </table:table-cell>
          <table:table-cell table:style-name="ce292"/>
          <table:table-cell table:style-name="ce291" table:number-columns-repeated="2"/>
          <table:table-cell table:style-name="ce293" office:value-type="float" office:value="930" calcext:value-type="float">
            <text:p>930.00</text:p>
          </table:table-cell>
          <table:table-cell table:style-name="ce293"/>
          <table:table-cell table:style-name="ce293" table:formula="of:=+[.H76]/2" office:value-type="float" office:value="465" calcext:value-type="float">
            <text:p>465.00</text:p>
          </table:table-cell>
          <table:table-cell table:style-name="ce293"/>
          <table:table-cell table:style-name="ce293" table:formula="of:=+SUM([.H76:.K76])" office:value-type="float" office:value="1395" calcext:value-type="float">
            <text:p>1,395.00</text:p>
          </table:table-cell>
          <table:table-cell table:style-name="ce293"/>
          <table:table-cell table:style-name="ce293" table:formula="of:=+[.L76]*[.$N$6]" office:value-type="float" office:value="181.35" calcext:value-type="float">
            <text:p>181.35</text:p>
          </table:table-cell>
          <table:table-cell table:style-name="ce293" table:number-columns-repeated="3"/>
          <table:table-cell table:style-name="ce293" table:formula="of:=+[.L76]*[.$R$6]" office:value-type="float" office:value="125.55" calcext:value-type="float">
            <text:p>125.55</text:p>
          </table:table-cell>
          <table:table-cell table:number-columns-repeated="16366"/>
        </table:table-row>
        <table:table-row table:style-name="ro13">
          <table:table-cell/>
          <table:covered-table-cell table:style-name="ce290"/>
          <table:table-cell table:style-name="ce291" table:number-columns-repeated="2"/>
          <table:table-cell table:style-name="ce292"/>
          <table:table-cell table:style-name="ce291" table:number-columns-repeated="2"/>
          <table:table-cell table:style-name="ce294" table:formula="of:=+SUM([.H73:.H76])" office:value-type="float" office:value="4290" calcext:value-type="float">
            <text:p>4,290.00</text:p>
          </table:table-cell>
          <table:table-cell table:style-name="ce294" table:formula="of:=+SUM([.I73:.I76])" office:value-type="float" office:value="0" calcext:value-type="float">
            <text:p>0.00</text:p>
          </table:table-cell>
          <table:table-cell table:style-name="ce294" table:formula="of:=+SUM([.J73:.J76])" office:value-type="float" office:value="2145" calcext:value-type="float">
            <text:p>2,145.00</text:p>
          </table:table-cell>
          <table:table-cell table:style-name="ce294" table:formula="of:=+SUM([.K73:.K76])" office:value-type="float" office:value="0" calcext:value-type="float">
            <text:p>0.00</text:p>
          </table:table-cell>
          <table:table-cell table:style-name="ce294" table:formula="of:=+SUM([.L73:.L76])" office:value-type="float" office:value="6435" calcext:value-type="float">
            <text:p>6,435.00</text:p>
          </table:table-cell>
          <table:table-cell table:style-name="ce294"/>
          <table:table-cell table:style-name="ce294" table:formula="of:=+SUM([.N73:.N76])" office:value-type="float" office:value="836.55" calcext:value-type="float">
            <text:p>836.55</text:p>
          </table:table-cell>
          <table:table-cell table:style-name="ce294" table:formula="of:=+SUM([.O73:.O76])" office:value-type="float" office:value="0" calcext:value-type="float">
            <text:p>0.00</text:p>
          </table:table-cell>
          <table:table-cell table:style-name="ce294" table:formula="of:=+SUM([.P73:.P76])" office:value-type="float" office:value="0" calcext:value-type="float">
            <text:p>0.00</text:p>
          </table:table-cell>
          <table:table-cell table:style-name="ce294" table:formula="of:=+SUM([.Q73:.Q76])" office:value-type="float" office:value="0" calcext:value-type="float">
            <text:p>0.00</text:p>
          </table:table-cell>
          <table:table-cell table:style-name="ce294" table:formula="of:=+SUM([.R73:.R76])" office:value-type="float" office:value="453.6" calcext:value-type="float">
            <text:p>453.60</text:p>
          </table:table-cell>
          <table:table-cell table:style-name="ce302" table:formula="of:=+[.O77]+[.P77]+[.Q7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3">
          <table:table-cell table:number-columns-repeated="12"/>
          <table:table-cell table:style-name="ce296" office:value-type="string" calcext:value-type="string">
            <text:p>pago</text:p>
          </table:table-cell>
          <table:table-cell table:style-name="ce296" office:value-type="float" office:value="0" calcext:value-type="float">
            <text:p>0</text:p>
          </table:table-cell>
          <table:table-cell table:number-columns-repeated="3" table:style-name="ce299" office:value-type="float" office:value="0" calcext:value-type="float">
            <text:p>0.00</text:p>
          </table:table-cell>
          <table:table-cell table:style-name="ce299" office:value-type="float" office:value="84" calcext:value-type="float">
            <text:p>84.00</text:p>
          </table:table-cell>
          <table:table-cell table:style-name="ce302" table:formula="of:=+[.L77]-[.N77]-[.S77]" office:value-type="float" office:value="5598.45" calcext:value-type="float">
            <text:p>5598.45</text:p>
          </table:table-cell>
          <table:table-cell table:number-columns-repeated="16365"/>
        </table:table-row>
        <table:table-row table:style-name="ro13">
          <table:table-cell table:number-columns-repeated="12"/>
          <table:table-cell table:style-name="ce296" office:value-type="string" calcext:value-type="string">
            <text:p>saldo</text:p>
          </table:table-cell>
          <table:table-cell table:style-name="ce296" office:value-type="float" office:value="0" calcext:value-type="float">
            <text:p>0</text:p>
          </table:table-cell>
          <table:table-cell table:number-columns-repeated="4" table:style-name="ce299" office:value-type="float" office:value="0" calcext:value-type="float">
            <text:p>0.00</text:p>
          </table:table-cell>
          <table:table-cell table:number-columns-repeated="16366"/>
        </table:table-row>
        <table:table-row table:style-name="ro13" table:number-rows-repeated="2">
          <table:table-cell table:number-columns-repeated="16384"/>
        </table:table-row>
        <table:table-row table:style-name="ro13">
          <table:table-cell/>
          <table:table-cell table:style-name="ce286" office:value-type="string" calcext:value-type="string" table:number-columns-spanned="1" table:number-rows-spanned="2">
            <text:p>Perido</text:p>
          </table:table-cell>
          <table:table-cell table:style-name="ce286" office:value-type="string" calcext:value-type="string" table:number-columns-spanned="1" table:number-rows-spanned="2">
            <text:p>Nro</text:p>
          </table:table-cell>
          <table:table-cell table:style-name="ce286" office:value-type="string" calcext:value-type="string" table:number-columns-spanned="1" table:number-rows-spanned="2">
            <text:p>Nombre</text:p>
          </table:table-cell>
          <table:table-cell table:style-name="ce286" office:value-type="string" calcext:value-type="string" table:number-columns-spanned="1" table:number-rows-spanned="2">
            <text:p>Feha de Nac</text:p>
          </table:table-cell>
          <table:table-cell table:style-name="ce286" office:value-type="string" calcext:value-type="string" table:number-columns-spanned="1" table:number-rows-spanned="2">
            <text:p>dni</text:p>
          </table:table-cell>
          <table:table-cell table:style-name="ce286" office:value-type="string" calcext:value-type="string" table:number-columns-spanned="1" table:number-rows-spanned="2">
            <text:p>cussp</text:p>
          </table:table-cell>
          <table:table-cell table:style-name="ce286" office:value-type="string" calcext:value-type="string" table:number-columns-spanned="1" table:number-rows-spanned="2">
            <text:p>Remunerac.</text:p>
          </table:table-cell>
          <table:table-cell table:style-name="ce286" office:value-type="string" calcext:value-type="string" table:number-columns-spanned="1" table:number-rows-spanned="2">
            <text:p>Asignac. Fam.</text:p>
          </table:table-cell>
          <table:table-cell table:style-name="ce286" office:value-type="string" calcext:value-type="string" table:number-columns-spanned="1" table:number-rows-spanned="2">
            <text:p>Gratificación</text:p>
          </table:table-cell>
          <table:table-cell table:style-name="ce286" office:value-type="string" calcext:value-type="string" table:number-columns-spanned="1" table:number-rows-spanned="2">
            <text:p>Indemnizac.</text:p>
          </table:table-cell>
          <table:table-cell table:style-name="ce286" office:value-type="string" calcext:value-type="string" table:number-columns-spanned="1" table:number-rows-spanned="2">
            <text:p>Base imponible</text:p>
          </table:table-cell>
          <table:table-cell table:style-name="ce286" office:value-type="string" calcext:value-type="string" table:number-columns-spanned="1" table:number-rows-spanned="2">
            <text:p>Sistema de pensiones</text:p>
          </table:table-cell>
          <table:table-cell table:style-name="ce297" office:value-type="string" calcext:value-type="string">
            <text:p>ONP</text:p>
          </table:table-cell>
          <table:table-cell table:style-name="ce297" office:value-type="string" calcext:value-type="string">
            <text:p>aporte</text:p>
          </table:table-cell>
          <table:table-cell table:style-name="ce297" office:value-type="string" calcext:value-type="string">
            <text:p>prima</text:p>
          </table:table-cell>
          <table:table-cell table:style-name="ce297" office:value-type="string" calcext:value-type="string">
            <text:p>comision</text:p>
          </table:table-cell>
          <table:table-cell table:style-name="ce297" office:value-type="string" calcext:value-type="string">
            <text:p>esalud</text:p>
          </table:table-cell>
          <table:table-cell table:number-columns-repeated="16366"/>
        </table:table-row>
        <table:table-row table:style-name="ro13">
          <table:table-cell/>
          <table:covered-table-cell table:number-columns-repeated="12" table:style-name="ce287"/>
          <table:table-cell table:style-name="ce298" office:value-type="percentage" office:value="0.13" calcext:value-type="percentage">
            <text:p>13 %</text:p>
          </table:table-cell>
          <table:table-cell table:style-name="ce298" office:value-type="percentage" office:value="0.1" calcext:value-type="percentage">
            <text:p>10 %</text:p>
          </table:table-cell>
          <table:table-cell table:style-name="ce300" office:value-type="percentage" office:value="0.0133" calcext:value-type="percentage">
            <text:p>1.33 %</text:p>
          </table:table-cell>
          <table:table-cell table:style-name="ce300" office:value-type="percentage" office:value="0.0155" calcext:value-type="percentage">
            <text:p>1.55 %</text:p>
          </table:table-cell>
          <table:table-cell table:style-name="ce298" office:value-type="percentage" office:value="0.09" calcext:value-type="percentage">
            <text:p>9 %</text:p>
          </table:table-cell>
          <table:table-cell table:number-columns-repeated="16366"/>
        </table:table-row>
        <table:table-row table:style-name="ro13">
          <table:table-cell/>
          <table:table-cell table:style-name="ce288" office:value-type="date" office:date-value="2021-08-01" calcext:value-type="date" table:number-columns-spanned="1" table:number-rows-spanned="5">
            <text:p>ago-21</text:p>
          </table:table-cell>
          <table:table-cell table:style-name="ce291"/>
          <table:table-cell table:style-name="ce291" office:value-type="string" calcext:value-type="string">
            <text:p>GERENTE GENERAL </text:p>
          </table:table-cell>
          <table:table-cell table:style-name="ce292"/>
          <table:table-cell table:style-name="ce291" table:number-columns-repeated="2"/>
          <table:table-cell table:style-name="ce293" office:value-type="float" office:value="1500" calcext:value-type="float">
            <text:p>1,500.00</text:p>
          </table:table-cell>
          <table:table-cell table:style-name="ce293" table:number-columns-repeated="3"/>
          <table:table-cell table:style-name="ce293" table:formula="of:=+SUM([.H84:.K84])" office:value-type="float" office:value="1500" calcext:value-type="float">
            <text:p>1,500.00</text:p>
          </table:table-cell>
          <table:table-cell table:style-name="ce293"/>
          <table:table-cell table:style-name="ce293" table:formula="of:=+[.L84]*[.$N$6]" office:value-type="float" office:value="195" calcext:value-type="float">
            <text:p>195.00</text:p>
          </table:table-cell>
          <table:table-cell table:style-name="ce293" table:number-columns-repeated="3"/>
          <table:table-cell table:style-name="ce293" table:formula="of:=+[.L84]*[.$R$6]" office:value-type="float" office:value="135" calcext:value-type="float">
            <text:p>135.00</text:p>
          </table:table-cell>
          <table:table-cell table:number-columns-repeated="16366"/>
        </table:table-row>
        <table:table-row table:style-name="ro13">
          <table:table-cell/>
          <table:covered-table-cell table:style-name="ce289"/>
          <table:table-cell table:style-name="ce291"/>
          <table:table-cell table:style-name="ce291" office:value-type="string" calcext:value-type="string">
            <text:p>TRABAJADOR 1</text:p>
          </table:table-cell>
          <table:table-cell table:style-name="ce292"/>
          <table:table-cell table:style-name="ce291" table:number-columns-repeated="2"/>
          <table:table-cell table:style-name="ce293" office:value-type="float" office:value="930" calcext:value-type="float">
            <text:p>930.00</text:p>
          </table:table-cell>
          <table:table-cell table:style-name="ce293" table:number-columns-repeated="3"/>
          <table:table-cell table:style-name="ce293" table:formula="of:=+SUM([.H85:.K85])" office:value-type="float" office:value="930" calcext:value-type="float">
            <text:p>930.00</text:p>
          </table:table-cell>
          <table:table-cell table:style-name="ce293"/>
          <table:table-cell table:style-name="ce293" table:formula="of:=+[.L85]*[.$N$6]" office:value-type="float" office:value="120.9" calcext:value-type="float">
            <text:p>120.90</text:p>
          </table:table-cell>
          <table:table-cell table:style-name="ce293" table:number-columns-repeated="4"/>
          <table:table-cell table:number-columns-repeated="16366"/>
        </table:table-row>
        <table:table-row table:style-name="ro13">
          <table:table-cell/>
          <table:covered-table-cell table:style-name="ce289"/>
          <table:table-cell table:style-name="ce291"/>
          <table:table-cell table:style-name="ce291" office:value-type="string" calcext:value-type="string">
            <text:p>TRABAJADOR 2</text:p>
          </table:table-cell>
          <table:table-cell table:style-name="ce292"/>
          <table:table-cell table:style-name="ce291" table:number-columns-repeated="2"/>
          <table:table-cell table:style-name="ce293" office:value-type="float" office:value="930" calcext:value-type="float">
            <text:p>930.00</text:p>
          </table:table-cell>
          <table:table-cell table:style-name="ce293" table:number-columns-repeated="3"/>
          <table:table-cell table:style-name="ce293" table:formula="of:=+SUM([.H86:.K86])" office:value-type="float" office:value="930" calcext:value-type="float">
            <text:p>930.00</text:p>
          </table:table-cell>
          <table:table-cell table:style-name="ce293"/>
          <table:table-cell table:style-name="ce293" table:formula="of:=+[.L86]*[.$N$6]" office:value-type="float" office:value="120.9" calcext:value-type="float">
            <text:p>120.90</text:p>
          </table:table-cell>
          <table:table-cell table:style-name="ce293" table:number-columns-repeated="3"/>
          <table:table-cell table:style-name="ce293" table:formula="of:=+[.L86]*[.$R$6]" office:value-type="float" office:value="83.7" calcext:value-type="float">
            <text:p>83.70</text:p>
          </table:table-cell>
          <table:table-cell table:number-columns-repeated="16366"/>
        </table:table-row>
        <table:table-row table:style-name="ro13">
          <table:table-cell/>
          <table:covered-table-cell table:style-name="ce289"/>
          <table:table-cell table:style-name="ce291"/>
          <table:table-cell table:style-name="ce291" office:value-type="string" calcext:value-type="string">
            <text:p>TRABAJADOR 3</text:p>
          </table:table-cell>
          <table:table-cell table:style-name="ce292"/>
          <table:table-cell table:style-name="ce291" table:number-columns-repeated="2"/>
          <table:table-cell table:style-name="ce293" office:value-type="float" office:value="930" calcext:value-type="float">
            <text:p>930.00</text:p>
          </table:table-cell>
          <table:table-cell table:style-name="ce293" table:number-columns-repeated="3"/>
          <table:table-cell table:style-name="ce293" table:formula="of:=+SUM([.H87:.K87])" office:value-type="float" office:value="930" calcext:value-type="float">
            <text:p>930.00</text:p>
          </table:table-cell>
          <table:table-cell table:style-name="ce293"/>
          <table:table-cell table:style-name="ce293" table:formula="of:=+[.L87]*[.$N$6]" office:value-type="float" office:value="120.9" calcext:value-type="float">
            <text:p>120.90</text:p>
          </table:table-cell>
          <table:table-cell table:style-name="ce293" table:number-columns-repeated="3"/>
          <table:table-cell table:style-name="ce293" table:formula="of:=+[.L87]*[.$R$6]" office:value-type="float" office:value="83.7" calcext:value-type="float">
            <text:p>83.70</text:p>
          </table:table-cell>
          <table:table-cell table:number-columns-repeated="16366"/>
        </table:table-row>
        <table:table-row table:style-name="ro13">
          <table:table-cell/>
          <table:covered-table-cell table:style-name="ce290"/>
          <table:table-cell table:style-name="ce291" table:number-columns-repeated="2"/>
          <table:table-cell table:style-name="ce292"/>
          <table:table-cell table:style-name="ce291" table:number-columns-repeated="2"/>
          <table:table-cell table:style-name="ce294" table:formula="of:=+SUM([.H84:.H87])" office:value-type="float" office:value="4290" calcext:value-type="float">
            <text:p>4,290.00</text:p>
          </table:table-cell>
          <table:table-cell table:style-name="ce294" table:formula="of:=+SUM([.I84:.I87])" office:value-type="float" office:value="0" calcext:value-type="float">
            <text:p>0.00</text:p>
          </table:table-cell>
          <table:table-cell table:style-name="ce294" table:formula="of:=+SUM([.J84:.J87])" office:value-type="float" office:value="0" calcext:value-type="float">
            <text:p>0.00</text:p>
          </table:table-cell>
          <table:table-cell table:style-name="ce294" table:formula="of:=+SUM([.K84:.K87])" office:value-type="float" office:value="0" calcext:value-type="float">
            <text:p>0.00</text:p>
          </table:table-cell>
          <table:table-cell table:style-name="ce294" table:formula="of:=+SUM([.L84:.L87])" office:value-type="float" office:value="4290" calcext:value-type="float">
            <text:p>4,290.00</text:p>
          </table:table-cell>
          <table:table-cell table:style-name="ce294"/>
          <table:table-cell table:style-name="ce294" table:formula="of:=+SUM([.N84:.N87])" office:value-type="float" office:value="557.7" calcext:value-type="float">
            <text:p>557.70</text:p>
          </table:table-cell>
          <table:table-cell table:style-name="ce294" table:formula="of:=+SUM([.O84:.O87])" office:value-type="float" office:value="0" calcext:value-type="float">
            <text:p>0.00</text:p>
          </table:table-cell>
          <table:table-cell table:style-name="ce294" table:formula="of:=+SUM([.P84:.P87])" office:value-type="float" office:value="0" calcext:value-type="float">
            <text:p>0.00</text:p>
          </table:table-cell>
          <table:table-cell table:style-name="ce294" table:formula="of:=+SUM([.Q84:.Q87])" office:value-type="float" office:value="0" calcext:value-type="float">
            <text:p>0.00</text:p>
          </table:table-cell>
          <table:table-cell table:style-name="ce294" table:formula="of:=+SUM([.R84:.R87])" office:value-type="float" office:value="302.4" calcext:value-type="float">
            <text:p>302.40</text:p>
          </table:table-cell>
          <table:table-cell table:style-name="ce302" table:formula="of:=+[.O88]+[.P88]+[.Q8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3">
          <table:table-cell table:number-columns-repeated="12"/>
          <table:table-cell table:style-name="ce296" office:value-type="string" calcext:value-type="string">
            <text:p>pago</text:p>
          </table:table-cell>
          <table:table-cell table:style-name="ce296" office:value-type="float" office:value="0" calcext:value-type="float">
            <text:p>0</text:p>
          </table:table-cell>
          <table:table-cell table:number-columns-repeated="3" table:style-name="ce299" office:value-type="float" office:value="0" calcext:value-type="float">
            <text:p>0.00</text:p>
          </table:table-cell>
          <table:table-cell table:style-name="ce299" office:value-type="float" office:value="84" calcext:value-type="float">
            <text:p>84.00</text:p>
          </table:table-cell>
          <table:table-cell table:style-name="ce302" table:formula="of:=+[.L88]-[.N88]-[.S88]" office:value-type="float" office:value="3732.3" calcext:value-type="float">
            <text:p>3732.30</text:p>
          </table:table-cell>
          <table:table-cell table:number-columns-repeated="16365"/>
        </table:table-row>
        <table:table-row table:style-name="ro13">
          <table:table-cell table:number-columns-repeated="12"/>
          <table:table-cell table:style-name="ce296" office:value-type="string" calcext:value-type="string">
            <text:p>saldo</text:p>
          </table:table-cell>
          <table:table-cell table:style-name="ce296" office:value-type="float" office:value="0" calcext:value-type="float">
            <text:p>0</text:p>
          </table:table-cell>
          <table:table-cell table:number-columns-repeated="4" table:style-name="ce299" office:value-type="float" office:value="0" calcext:value-type="float">
            <text:p>0.00</text:p>
          </table:table-cell>
          <table:table-cell table:number-columns-repeated="16366"/>
        </table:table-row>
        <table:table-row table:style-name="ro13" table:number-rows-repeated="2">
          <table:table-cell table:number-columns-repeated="16384"/>
        </table:table-row>
        <table:table-row table:style-name="ro13">
          <table:table-cell/>
          <table:table-cell table:style-name="ce286" office:value-type="string" calcext:value-type="string" table:number-columns-spanned="1" table:number-rows-spanned="2">
            <text:p>Perido</text:p>
          </table:table-cell>
          <table:table-cell table:style-name="ce286" office:value-type="string" calcext:value-type="string" table:number-columns-spanned="1" table:number-rows-spanned="2">
            <text:p>Nro</text:p>
          </table:table-cell>
          <table:table-cell table:style-name="ce286" office:value-type="string" calcext:value-type="string" table:number-columns-spanned="1" table:number-rows-spanned="2">
            <text:p>Nombre</text:p>
          </table:table-cell>
          <table:table-cell table:style-name="ce286" office:value-type="string" calcext:value-type="string" table:number-columns-spanned="1" table:number-rows-spanned="2">
            <text:p>Feha de Nac</text:p>
          </table:table-cell>
          <table:table-cell table:style-name="ce286" office:value-type="string" calcext:value-type="string" table:number-columns-spanned="1" table:number-rows-spanned="2">
            <text:p>dni</text:p>
          </table:table-cell>
          <table:table-cell table:style-name="ce286" office:value-type="string" calcext:value-type="string" table:number-columns-spanned="1" table:number-rows-spanned="2">
            <text:p>cussp</text:p>
          </table:table-cell>
          <table:table-cell table:style-name="ce286" office:value-type="string" calcext:value-type="string" table:number-columns-spanned="1" table:number-rows-spanned="2">
            <text:p>Remunerac.</text:p>
          </table:table-cell>
          <table:table-cell table:style-name="ce286" office:value-type="string" calcext:value-type="string" table:number-columns-spanned="1" table:number-rows-spanned="2">
            <text:p>Asignac. Fam.</text:p>
          </table:table-cell>
          <table:table-cell table:style-name="ce286" office:value-type="string" calcext:value-type="string" table:number-columns-spanned="1" table:number-rows-spanned="2">
            <text:p>Gratificación</text:p>
          </table:table-cell>
          <table:table-cell table:style-name="ce286" office:value-type="string" calcext:value-type="string" table:number-columns-spanned="1" table:number-rows-spanned="2">
            <text:p>Indemnizac.</text:p>
          </table:table-cell>
          <table:table-cell table:style-name="ce286" office:value-type="string" calcext:value-type="string" table:number-columns-spanned="1" table:number-rows-spanned="2">
            <text:p>Base imponible</text:p>
          </table:table-cell>
          <table:table-cell table:style-name="ce286" office:value-type="string" calcext:value-type="string" table:number-columns-spanned="1" table:number-rows-spanned="2">
            <text:p>Sistema de pensiones</text:p>
          </table:table-cell>
          <table:table-cell table:style-name="ce297" office:value-type="string" calcext:value-type="string">
            <text:p>ONP</text:p>
          </table:table-cell>
          <table:table-cell table:style-name="ce297" office:value-type="string" calcext:value-type="string">
            <text:p>aporte</text:p>
          </table:table-cell>
          <table:table-cell table:style-name="ce297" office:value-type="string" calcext:value-type="string">
            <text:p>prima</text:p>
          </table:table-cell>
          <table:table-cell table:style-name="ce297" office:value-type="string" calcext:value-type="string">
            <text:p>comision</text:p>
          </table:table-cell>
          <table:table-cell table:style-name="ce297" office:value-type="string" calcext:value-type="string">
            <text:p>esalud</text:p>
          </table:table-cell>
          <table:table-cell table:number-columns-repeated="16366"/>
        </table:table-row>
        <table:table-row table:style-name="ro13">
          <table:table-cell/>
          <table:covered-table-cell table:number-columns-repeated="12" table:style-name="ce287"/>
          <table:table-cell table:style-name="ce298" office:value-type="percentage" office:value="0.13" calcext:value-type="percentage">
            <text:p>13 %</text:p>
          </table:table-cell>
          <table:table-cell table:style-name="ce298" office:value-type="percentage" office:value="0.1" calcext:value-type="percentage">
            <text:p>10 %</text:p>
          </table:table-cell>
          <table:table-cell table:style-name="ce300" office:value-type="percentage" office:value="0.0133" calcext:value-type="percentage">
            <text:p>1.33 %</text:p>
          </table:table-cell>
          <table:table-cell table:style-name="ce300" office:value-type="percentage" office:value="0.0155" calcext:value-type="percentage">
            <text:p>1.55 %</text:p>
          </table:table-cell>
          <table:table-cell table:style-name="ce298" office:value-type="percentage" office:value="0.09" calcext:value-type="percentage">
            <text:p>9 %</text:p>
          </table:table-cell>
          <table:table-cell table:number-columns-repeated="16366"/>
        </table:table-row>
        <table:table-row table:style-name="ro13">
          <table:table-cell/>
          <table:table-cell table:style-name="ce288" office:value-type="date" office:date-value="2021-09-01" calcext:value-type="date" table:number-columns-spanned="1" table:number-rows-spanned="5">
            <text:p>sep-21</text:p>
          </table:table-cell>
          <table:table-cell table:style-name="ce291"/>
          <table:table-cell table:style-name="ce291" office:value-type="string" calcext:value-type="string">
            <text:p>GERENTE GENERAL </text:p>
          </table:table-cell>
          <table:table-cell table:style-name="ce292"/>
          <table:table-cell table:style-name="ce291" table:number-columns-repeated="2"/>
          <table:table-cell table:style-name="ce293" office:value-type="float" office:value="1500" calcext:value-type="float">
            <text:p>1,500.00</text:p>
          </table:table-cell>
          <table:table-cell table:style-name="ce293" table:number-columns-repeated="3"/>
          <table:table-cell table:style-name="ce293" table:formula="of:=+SUM([.H95:.K95])" office:value-type="float" office:value="1500" calcext:value-type="float">
            <text:p>1,500.00</text:p>
          </table:table-cell>
          <table:table-cell table:style-name="ce293"/>
          <table:table-cell table:style-name="ce293" table:formula="of:=+[.L95]*[.$N$6]" office:value-type="float" office:value="195" calcext:value-type="float">
            <text:p>195.00</text:p>
          </table:table-cell>
          <table:table-cell table:style-name="ce293" table:number-columns-repeated="3"/>
          <table:table-cell table:style-name="ce293" table:formula="of:=+[.L95]*[.$R$6]" office:value-type="float" office:value="135" calcext:value-type="float">
            <text:p>135.00</text:p>
          </table:table-cell>
          <table:table-cell table:number-columns-repeated="16366"/>
        </table:table-row>
        <table:table-row table:style-name="ro13">
          <table:table-cell/>
          <table:covered-table-cell table:style-name="ce289"/>
          <table:table-cell table:style-name="ce291"/>
          <table:table-cell table:style-name="ce291" office:value-type="string" calcext:value-type="string">
            <text:p>TRABAJADOR 1</text:p>
          </table:table-cell>
          <table:table-cell table:style-name="ce292"/>
          <table:table-cell table:style-name="ce291" table:number-columns-repeated="2"/>
          <table:table-cell table:style-name="ce293" office:value-type="float" office:value="930" calcext:value-type="float">
            <text:p>930.00</text:p>
          </table:table-cell>
          <table:table-cell table:style-name="ce293" table:number-columns-repeated="3"/>
          <table:table-cell table:style-name="ce293" table:formula="of:=+SUM([.H96:.K96])" office:value-type="float" office:value="930" calcext:value-type="float">
            <text:p>930.00</text:p>
          </table:table-cell>
          <table:table-cell table:style-name="ce293"/>
          <table:table-cell table:style-name="ce293" table:formula="of:=+[.L96]*[.$N$6]" office:value-type="float" office:value="120.9" calcext:value-type="float">
            <text:p>120.90</text:p>
          </table:table-cell>
          <table:table-cell table:style-name="ce293" table:number-columns-repeated="4"/>
          <table:table-cell table:number-columns-repeated="16366"/>
        </table:table-row>
        <table:table-row table:style-name="ro13">
          <table:table-cell/>
          <table:covered-table-cell table:style-name="ce289"/>
          <table:table-cell table:style-name="ce291"/>
          <table:table-cell table:style-name="ce291" office:value-type="string" calcext:value-type="string">
            <text:p>TRABAJADOR 2</text:p>
          </table:table-cell>
          <table:table-cell table:style-name="ce292"/>
          <table:table-cell table:style-name="ce291" table:number-columns-repeated="2"/>
          <table:table-cell table:style-name="ce293" office:value-type="float" office:value="930" calcext:value-type="float">
            <text:p>930.00</text:p>
          </table:table-cell>
          <table:table-cell table:style-name="ce293" table:number-columns-repeated="3"/>
          <table:table-cell table:style-name="ce293" table:formula="of:=+SUM([.H97:.K97])" office:value-type="float" office:value="930" calcext:value-type="float">
            <text:p>930.00</text:p>
          </table:table-cell>
          <table:table-cell table:style-name="ce293"/>
          <table:table-cell table:style-name="ce293" table:formula="of:=+[.L97]*[.$N$6]" office:value-type="float" office:value="120.9" calcext:value-type="float">
            <text:p>120.90</text:p>
          </table:table-cell>
          <table:table-cell table:style-name="ce293" table:number-columns-repeated="3"/>
          <table:table-cell table:style-name="ce293" table:formula="of:=+[.L97]*[.$R$6]" office:value-type="float" office:value="83.7" calcext:value-type="float">
            <text:p>83.70</text:p>
          </table:table-cell>
          <table:table-cell table:number-columns-repeated="16366"/>
        </table:table-row>
        <table:table-row table:style-name="ro13">
          <table:table-cell/>
          <table:covered-table-cell table:style-name="ce289"/>
          <table:table-cell table:style-name="ce291"/>
          <table:table-cell table:style-name="ce291" office:value-type="string" calcext:value-type="string">
            <text:p>TRABAJADOR 3</text:p>
          </table:table-cell>
          <table:table-cell table:style-name="ce292"/>
          <table:table-cell table:style-name="ce291" table:number-columns-repeated="2"/>
          <table:table-cell table:style-name="ce293" office:value-type="float" office:value="930" calcext:value-type="float">
            <text:p>930.00</text:p>
          </table:table-cell>
          <table:table-cell table:style-name="ce293" table:number-columns-repeated="3"/>
          <table:table-cell table:style-name="ce293" table:formula="of:=+SUM([.H98:.K98])" office:value-type="float" office:value="930" calcext:value-type="float">
            <text:p>930.00</text:p>
          </table:table-cell>
          <table:table-cell table:style-name="ce293"/>
          <table:table-cell table:style-name="ce293" table:formula="of:=+[.L98]*[.$N$6]" office:value-type="float" office:value="120.9" calcext:value-type="float">
            <text:p>120.90</text:p>
          </table:table-cell>
          <table:table-cell table:style-name="ce293" table:number-columns-repeated="3"/>
          <table:table-cell table:style-name="ce293" table:formula="of:=+[.L98]*[.$R$6]" office:value-type="float" office:value="83.7" calcext:value-type="float">
            <text:p>83.70</text:p>
          </table:table-cell>
          <table:table-cell table:number-columns-repeated="16366"/>
        </table:table-row>
        <table:table-row table:style-name="ro13">
          <table:table-cell/>
          <table:covered-table-cell table:style-name="ce290"/>
          <table:table-cell table:style-name="ce291" table:number-columns-repeated="2"/>
          <table:table-cell table:style-name="ce292"/>
          <table:table-cell table:style-name="ce291" table:number-columns-repeated="2"/>
          <table:table-cell table:style-name="ce294" table:formula="of:=+SUM([.H95:.H98])" office:value-type="float" office:value="4290" calcext:value-type="float">
            <text:p>4,290.00</text:p>
          </table:table-cell>
          <table:table-cell table:style-name="ce294" table:formula="of:=+SUM([.I95:.I98])" office:value-type="float" office:value="0" calcext:value-type="float">
            <text:p>0.00</text:p>
          </table:table-cell>
          <table:table-cell table:style-name="ce294" table:formula="of:=+SUM([.J95:.J98])" office:value-type="float" office:value="0" calcext:value-type="float">
            <text:p>0.00</text:p>
          </table:table-cell>
          <table:table-cell table:style-name="ce294" table:formula="of:=+SUM([.K95:.K98])" office:value-type="float" office:value="0" calcext:value-type="float">
            <text:p>0.00</text:p>
          </table:table-cell>
          <table:table-cell table:style-name="ce294" table:formula="of:=+SUM([.L95:.L98])" office:value-type="float" office:value="4290" calcext:value-type="float">
            <text:p>4,290.00</text:p>
          </table:table-cell>
          <table:table-cell table:style-name="ce294"/>
          <table:table-cell table:style-name="ce294" table:formula="of:=+SUM([.N95:.N98])" office:value-type="float" office:value="557.7" calcext:value-type="float">
            <text:p>557.70</text:p>
          </table:table-cell>
          <table:table-cell table:style-name="ce294" table:formula="of:=+SUM([.O95:.O98])" office:value-type="float" office:value="0" calcext:value-type="float">
            <text:p>0.00</text:p>
          </table:table-cell>
          <table:table-cell table:style-name="ce294" table:formula="of:=+SUM([.P95:.P98])" office:value-type="float" office:value="0" calcext:value-type="float">
            <text:p>0.00</text:p>
          </table:table-cell>
          <table:table-cell table:style-name="ce294" table:formula="of:=+SUM([.Q95:.Q98])" office:value-type="float" office:value="0" calcext:value-type="float">
            <text:p>0.00</text:p>
          </table:table-cell>
          <table:table-cell table:style-name="ce294" table:formula="of:=+SUM([.R95:.R98])" office:value-type="float" office:value="302.4" calcext:value-type="float">
            <text:p>302.40</text:p>
          </table:table-cell>
          <table:table-cell table:style-name="ce302" table:formula="of:=+[.O99]+[.P99]+[.Q9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3">
          <table:table-cell table:number-columns-repeated="12"/>
          <table:table-cell table:style-name="ce296" office:value-type="string" calcext:value-type="string">
            <text:p>pago</text:p>
          </table:table-cell>
          <table:table-cell table:style-name="ce296" office:value-type="float" office:value="0" calcext:value-type="float">
            <text:p>0</text:p>
          </table:table-cell>
          <table:table-cell table:number-columns-repeated="3" table:style-name="ce299" office:value-type="float" office:value="0" calcext:value-type="float">
            <text:p>0.00</text:p>
          </table:table-cell>
          <table:table-cell table:style-name="ce299" office:value-type="float" office:value="84" calcext:value-type="float">
            <text:p>84.00</text:p>
          </table:table-cell>
          <table:table-cell table:style-name="ce302" table:formula="of:=+[.L99]-[.N99]-[.S99]" office:value-type="float" office:value="3732.3" calcext:value-type="float">
            <text:p>3732.30</text:p>
          </table:table-cell>
          <table:table-cell table:number-columns-repeated="16365"/>
        </table:table-row>
        <table:table-row table:style-name="ro13">
          <table:table-cell table:number-columns-repeated="12"/>
          <table:table-cell table:style-name="ce296" office:value-type="string" calcext:value-type="string">
            <text:p>saldo</text:p>
          </table:table-cell>
          <table:table-cell table:style-name="ce296" office:value-type="float" office:value="0" calcext:value-type="float">
            <text:p>0</text:p>
          </table:table-cell>
          <table:table-cell table:number-columns-repeated="4" table:style-name="ce299" office:value-type="float" office:value="0" calcext:value-type="float">
            <text:p>0.00</text:p>
          </table:table-cell>
          <table:table-cell table:number-columns-repeated="16366"/>
        </table:table-row>
        <table:table-row table:style-name="ro13" table:number-rows-repeated="2">
          <table:table-cell table:number-columns-repeated="16384"/>
        </table:table-row>
        <table:table-row table:style-name="ro13">
          <table:table-cell/>
          <table:table-cell table:style-name="ce286" office:value-type="string" calcext:value-type="string" table:number-columns-spanned="1" table:number-rows-spanned="2">
            <text:p>Perido</text:p>
          </table:table-cell>
          <table:table-cell table:style-name="ce286" office:value-type="string" calcext:value-type="string" table:number-columns-spanned="1" table:number-rows-spanned="2">
            <text:p>Nro</text:p>
          </table:table-cell>
          <table:table-cell table:style-name="ce286" office:value-type="string" calcext:value-type="string" table:number-columns-spanned="1" table:number-rows-spanned="2">
            <text:p>Nombre</text:p>
          </table:table-cell>
          <table:table-cell table:style-name="ce286" office:value-type="string" calcext:value-type="string" table:number-columns-spanned="1" table:number-rows-spanned="2">
            <text:p>Feha de Nac</text:p>
          </table:table-cell>
          <table:table-cell table:style-name="ce286" office:value-type="string" calcext:value-type="string" table:number-columns-spanned="1" table:number-rows-spanned="2">
            <text:p>dni</text:p>
          </table:table-cell>
          <table:table-cell table:style-name="ce286" office:value-type="string" calcext:value-type="string" table:number-columns-spanned="1" table:number-rows-spanned="2">
            <text:p>cussp</text:p>
          </table:table-cell>
          <table:table-cell table:style-name="ce286" office:value-type="string" calcext:value-type="string" table:number-columns-spanned="1" table:number-rows-spanned="2">
            <text:p>Remunerac.</text:p>
          </table:table-cell>
          <table:table-cell table:style-name="ce286" office:value-type="string" calcext:value-type="string" table:number-columns-spanned="1" table:number-rows-spanned="2">
            <text:p>Asignac. Fam.</text:p>
          </table:table-cell>
          <table:table-cell table:style-name="ce286" office:value-type="string" calcext:value-type="string" table:number-columns-spanned="1" table:number-rows-spanned="2">
            <text:p>Gratificación</text:p>
          </table:table-cell>
          <table:table-cell table:style-name="ce286" office:value-type="string" calcext:value-type="string" table:number-columns-spanned="1" table:number-rows-spanned="2">
            <text:p>Indemnizac.</text:p>
          </table:table-cell>
          <table:table-cell table:style-name="ce286" office:value-type="string" calcext:value-type="string" table:number-columns-spanned="1" table:number-rows-spanned="2">
            <text:p>Base imponible</text:p>
          </table:table-cell>
          <table:table-cell table:style-name="ce286" office:value-type="string" calcext:value-type="string" table:number-columns-spanned="1" table:number-rows-spanned="2">
            <text:p>Sistema de pensiones</text:p>
          </table:table-cell>
          <table:table-cell table:style-name="ce297" office:value-type="string" calcext:value-type="string">
            <text:p>ONP</text:p>
          </table:table-cell>
          <table:table-cell table:style-name="ce297" office:value-type="string" calcext:value-type="string">
            <text:p>aporte</text:p>
          </table:table-cell>
          <table:table-cell table:style-name="ce297" office:value-type="string" calcext:value-type="string">
            <text:p>prima</text:p>
          </table:table-cell>
          <table:table-cell table:style-name="ce297" office:value-type="string" calcext:value-type="string">
            <text:p>comision</text:p>
          </table:table-cell>
          <table:table-cell table:style-name="ce297" office:value-type="string" calcext:value-type="string">
            <text:p>esalud</text:p>
          </table:table-cell>
          <table:table-cell table:number-columns-repeated="16366"/>
        </table:table-row>
        <table:table-row table:style-name="ro13">
          <table:table-cell/>
          <table:covered-table-cell table:number-columns-repeated="12" table:style-name="ce287"/>
          <table:table-cell table:style-name="ce298" office:value-type="percentage" office:value="0.13" calcext:value-type="percentage">
            <text:p>13 %</text:p>
          </table:table-cell>
          <table:table-cell table:style-name="ce298" office:value-type="percentage" office:value="0.1" calcext:value-type="percentage">
            <text:p>10 %</text:p>
          </table:table-cell>
          <table:table-cell table:style-name="ce300" office:value-type="percentage" office:value="0.0133" calcext:value-type="percentage">
            <text:p>1.33 %</text:p>
          </table:table-cell>
          <table:table-cell table:style-name="ce300" office:value-type="percentage" office:value="0.0155" calcext:value-type="percentage">
            <text:p>1.55 %</text:p>
          </table:table-cell>
          <table:table-cell table:style-name="ce298" office:value-type="percentage" office:value="0.09" calcext:value-type="percentage">
            <text:p>9 %</text:p>
          </table:table-cell>
          <table:table-cell table:number-columns-repeated="16366"/>
        </table:table-row>
        <table:table-row table:style-name="ro13">
          <table:table-cell/>
          <table:table-cell table:style-name="ce288" office:value-type="date" office:date-value="2021-10-01" calcext:value-type="date" table:number-columns-spanned="1" table:number-rows-spanned="5">
            <text:p>oct-21</text:p>
          </table:table-cell>
          <table:table-cell table:style-name="ce291"/>
          <table:table-cell table:style-name="ce291" office:value-type="string" calcext:value-type="string">
            <text:p>GERENTE GENERAL </text:p>
          </table:table-cell>
          <table:table-cell table:style-name="ce292"/>
          <table:table-cell table:style-name="ce291" table:number-columns-repeated="2"/>
          <table:table-cell table:style-name="ce293" office:value-type="float" office:value="1500" calcext:value-type="float">
            <text:p>1,500.00</text:p>
          </table:table-cell>
          <table:table-cell table:style-name="ce293" table:number-columns-repeated="3"/>
          <table:table-cell table:style-name="ce293" table:formula="of:=+SUM([.H106:.K106])" office:value-type="float" office:value="1500" calcext:value-type="float">
            <text:p>1,500.00</text:p>
          </table:table-cell>
          <table:table-cell table:style-name="ce293"/>
          <table:table-cell table:style-name="ce293" table:formula="of:=+[.L106]*[.$N$6]" office:value-type="float" office:value="195" calcext:value-type="float">
            <text:p>195.00</text:p>
          </table:table-cell>
          <table:table-cell table:style-name="ce293" table:number-columns-repeated="3"/>
          <table:table-cell table:style-name="ce293" table:formula="of:=+[.L106]*[.$R$6]" office:value-type="float" office:value="135" calcext:value-type="float">
            <text:p>135.00</text:p>
          </table:table-cell>
          <table:table-cell table:number-columns-repeated="16366"/>
        </table:table-row>
        <table:table-row table:style-name="ro13">
          <table:table-cell/>
          <table:covered-table-cell table:style-name="ce289"/>
          <table:table-cell table:style-name="ce291"/>
          <table:table-cell table:style-name="ce291" office:value-type="string" calcext:value-type="string">
            <text:p>TRABAJADOR 1</text:p>
          </table:table-cell>
          <table:table-cell table:style-name="ce292"/>
          <table:table-cell table:style-name="ce291" table:number-columns-repeated="2"/>
          <table:table-cell table:style-name="ce293" office:value-type="float" office:value="930" calcext:value-type="float">
            <text:p>930.00</text:p>
          </table:table-cell>
          <table:table-cell table:style-name="ce293" table:number-columns-repeated="3"/>
          <table:table-cell table:style-name="ce293" table:formula="of:=+SUM([.H107:.K107])" office:value-type="float" office:value="930" calcext:value-type="float">
            <text:p>930.00</text:p>
          </table:table-cell>
          <table:table-cell table:style-name="ce293"/>
          <table:table-cell table:style-name="ce293" table:formula="of:=+[.L107]*[.$N$6]" office:value-type="float" office:value="120.9" calcext:value-type="float">
            <text:p>120.90</text:p>
          </table:table-cell>
          <table:table-cell table:style-name="ce293" table:number-columns-repeated="4"/>
          <table:table-cell table:number-columns-repeated="16366"/>
        </table:table-row>
        <table:table-row table:style-name="ro13">
          <table:table-cell/>
          <table:covered-table-cell table:style-name="ce289"/>
          <table:table-cell table:style-name="ce291"/>
          <table:table-cell table:style-name="ce291" office:value-type="string" calcext:value-type="string">
            <text:p>TRABAJADOR 2</text:p>
          </table:table-cell>
          <table:table-cell table:style-name="ce292"/>
          <table:table-cell table:style-name="ce291" table:number-columns-repeated="2"/>
          <table:table-cell table:style-name="ce293" office:value-type="float" office:value="930" calcext:value-type="float">
            <text:p>930.00</text:p>
          </table:table-cell>
          <table:table-cell table:style-name="ce293" table:number-columns-repeated="3"/>
          <table:table-cell table:style-name="ce293" table:formula="of:=+SUM([.H108:.K108])" office:value-type="float" office:value="930" calcext:value-type="float">
            <text:p>930.00</text:p>
          </table:table-cell>
          <table:table-cell table:style-name="ce293"/>
          <table:table-cell table:style-name="ce293" table:formula="of:=+[.L108]*[.$N$6]" office:value-type="float" office:value="120.9" calcext:value-type="float">
            <text:p>120.90</text:p>
          </table:table-cell>
          <table:table-cell table:style-name="ce293" table:number-columns-repeated="3"/>
          <table:table-cell table:style-name="ce293" table:formula="of:=+[.L108]*[.$R$6]" office:value-type="float" office:value="83.7" calcext:value-type="float">
            <text:p>83.70</text:p>
          </table:table-cell>
          <table:table-cell table:number-columns-repeated="16366"/>
        </table:table-row>
        <table:table-row table:style-name="ro13">
          <table:table-cell/>
          <table:covered-table-cell table:style-name="ce289"/>
          <table:table-cell table:style-name="ce291"/>
          <table:table-cell table:style-name="ce291" office:value-type="string" calcext:value-type="string">
            <text:p>TRABAJADOR 3</text:p>
          </table:table-cell>
          <table:table-cell table:style-name="ce292"/>
          <table:table-cell table:style-name="ce291" table:number-columns-repeated="2"/>
          <table:table-cell table:style-name="ce293" office:value-type="float" office:value="930" calcext:value-type="float">
            <text:p>930.00</text:p>
          </table:table-cell>
          <table:table-cell table:style-name="ce293" table:number-columns-repeated="3"/>
          <table:table-cell table:style-name="ce293" table:formula="of:=+SUM([.H109:.K109])" office:value-type="float" office:value="930" calcext:value-type="float">
            <text:p>930.00</text:p>
          </table:table-cell>
          <table:table-cell table:style-name="ce293"/>
          <table:table-cell table:style-name="ce293" table:formula="of:=+[.L109]*[.$N$6]" office:value-type="float" office:value="120.9" calcext:value-type="float">
            <text:p>120.90</text:p>
          </table:table-cell>
          <table:table-cell table:style-name="ce293" table:number-columns-repeated="3"/>
          <table:table-cell table:style-name="ce293" table:formula="of:=+[.L109]*[.$R$6]" office:value-type="float" office:value="83.7" calcext:value-type="float">
            <text:p>83.70</text:p>
          </table:table-cell>
          <table:table-cell table:number-columns-repeated="16366"/>
        </table:table-row>
        <table:table-row table:style-name="ro13">
          <table:table-cell/>
          <table:covered-table-cell table:style-name="ce290"/>
          <table:table-cell table:style-name="ce291" table:number-columns-repeated="2"/>
          <table:table-cell table:style-name="ce292"/>
          <table:table-cell table:style-name="ce291" table:number-columns-repeated="2"/>
          <table:table-cell table:style-name="ce294" table:formula="of:=+SUM([.H106:.H109])" office:value-type="float" office:value="4290" calcext:value-type="float">
            <text:p>4,290.00</text:p>
          </table:table-cell>
          <table:table-cell table:style-name="ce294" table:formula="of:=+SUM([.I106:.I109])" office:value-type="float" office:value="0" calcext:value-type="float">
            <text:p>0.00</text:p>
          </table:table-cell>
          <table:table-cell table:style-name="ce294" table:formula="of:=+SUM([.J106:.J109])" office:value-type="float" office:value="0" calcext:value-type="float">
            <text:p>0.00</text:p>
          </table:table-cell>
          <table:table-cell table:style-name="ce294" table:formula="of:=+SUM([.K106:.K109])" office:value-type="float" office:value="0" calcext:value-type="float">
            <text:p>0.00</text:p>
          </table:table-cell>
          <table:table-cell table:style-name="ce294" table:formula="of:=+SUM([.L106:.L109])" office:value-type="float" office:value="4290" calcext:value-type="float">
            <text:p>4,290.00</text:p>
          </table:table-cell>
          <table:table-cell table:style-name="ce294"/>
          <table:table-cell table:style-name="ce294" table:formula="of:=+SUM([.N106:.N109])" office:value-type="float" office:value="557.7" calcext:value-type="float">
            <text:p>557.70</text:p>
          </table:table-cell>
          <table:table-cell table:style-name="ce294" table:formula="of:=+SUM([.O106:.O109])" office:value-type="float" office:value="0" calcext:value-type="float">
            <text:p>0.00</text:p>
          </table:table-cell>
          <table:table-cell table:style-name="ce294" table:formula="of:=+SUM([.P106:.P109])" office:value-type="float" office:value="0" calcext:value-type="float">
            <text:p>0.00</text:p>
          </table:table-cell>
          <table:table-cell table:style-name="ce294" table:formula="of:=+SUM([.Q106:.Q109])" office:value-type="float" office:value="0" calcext:value-type="float">
            <text:p>0.00</text:p>
          </table:table-cell>
          <table:table-cell table:style-name="ce294" table:formula="of:=+SUM([.R106:.R109])" office:value-type="float" office:value="302.4" calcext:value-type="float">
            <text:p>302.40</text:p>
          </table:table-cell>
          <table:table-cell table:style-name="ce302" table:formula="of:=+[.O110]+[.P110]+[.Q11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3">
          <table:table-cell table:number-columns-repeated="12"/>
          <table:table-cell table:style-name="ce296" office:value-type="string" calcext:value-type="string">
            <text:p>pago</text:p>
          </table:table-cell>
          <table:table-cell table:style-name="ce296" office:value-type="float" office:value="0" calcext:value-type="float">
            <text:p>0</text:p>
          </table:table-cell>
          <table:table-cell table:number-columns-repeated="3" table:style-name="ce299" office:value-type="float" office:value="0" calcext:value-type="float">
            <text:p>0.00</text:p>
          </table:table-cell>
          <table:table-cell table:style-name="ce299" office:value-type="float" office:value="84" calcext:value-type="float">
            <text:p>84.00</text:p>
          </table:table-cell>
          <table:table-cell table:style-name="ce302" table:formula="of:=+[.L110]-[.N110]-[.S110]" office:value-type="float" office:value="3732.3" calcext:value-type="float">
            <text:p>3732.30</text:p>
          </table:table-cell>
          <table:table-cell table:number-columns-repeated="16365"/>
        </table:table-row>
        <table:table-row table:style-name="ro13">
          <table:table-cell table:number-columns-repeated="12"/>
          <table:table-cell table:style-name="ce296" office:value-type="string" calcext:value-type="string">
            <text:p>saldo</text:p>
          </table:table-cell>
          <table:table-cell table:style-name="ce296" office:value-type="float" office:value="0" calcext:value-type="float">
            <text:p>0</text:p>
          </table:table-cell>
          <table:table-cell table:number-columns-repeated="4" table:style-name="ce299" office:value-type="float" office:value="0" calcext:value-type="float">
            <text:p>0.00</text:p>
          </table:table-cell>
          <table:table-cell table:number-columns-repeated="16366"/>
        </table:table-row>
        <table:table-row table:style-name="ro13" table:number-rows-repeated="2">
          <table:table-cell table:number-columns-repeated="16384"/>
        </table:table-row>
        <table:table-row table:style-name="ro13">
          <table:table-cell/>
          <table:table-cell table:style-name="ce286" office:value-type="string" calcext:value-type="string" table:number-columns-spanned="1" table:number-rows-spanned="2">
            <text:p>Perido</text:p>
          </table:table-cell>
          <table:table-cell table:style-name="ce286" office:value-type="string" calcext:value-type="string" table:number-columns-spanned="1" table:number-rows-spanned="2">
            <text:p>Nro</text:p>
          </table:table-cell>
          <table:table-cell table:style-name="ce286" office:value-type="string" calcext:value-type="string" table:number-columns-spanned="1" table:number-rows-spanned="2">
            <text:p>Nombre</text:p>
          </table:table-cell>
          <table:table-cell table:style-name="ce286" office:value-type="string" calcext:value-type="string" table:number-columns-spanned="1" table:number-rows-spanned="2">
            <text:p>Feha de Nac</text:p>
          </table:table-cell>
          <table:table-cell table:style-name="ce286" office:value-type="string" calcext:value-type="string" table:number-columns-spanned="1" table:number-rows-spanned="2">
            <text:p>dni</text:p>
          </table:table-cell>
          <table:table-cell table:style-name="ce286" office:value-type="string" calcext:value-type="string" table:number-columns-spanned="1" table:number-rows-spanned="2">
            <text:p>cussp</text:p>
          </table:table-cell>
          <table:table-cell table:style-name="ce286" office:value-type="string" calcext:value-type="string" table:number-columns-spanned="1" table:number-rows-spanned="2">
            <text:p>Remunerac.</text:p>
          </table:table-cell>
          <table:table-cell table:style-name="ce286" office:value-type="string" calcext:value-type="string" table:number-columns-spanned="1" table:number-rows-spanned="2">
            <text:p>Asignac. Fam.</text:p>
          </table:table-cell>
          <table:table-cell table:style-name="ce286" office:value-type="string" calcext:value-type="string" table:number-columns-spanned="1" table:number-rows-spanned="2">
            <text:p>Gratificación</text:p>
          </table:table-cell>
          <table:table-cell table:style-name="ce286" office:value-type="string" calcext:value-type="string" table:number-columns-spanned="1" table:number-rows-spanned="2">
            <text:p>CTS</text:p>
          </table:table-cell>
          <table:table-cell table:style-name="ce286" office:value-type="string" calcext:value-type="string" table:number-columns-spanned="1" table:number-rows-spanned="2">
            <text:p>Base imponible</text:p>
          </table:table-cell>
          <table:table-cell table:style-name="ce286" office:value-type="string" calcext:value-type="string" table:number-columns-spanned="1" table:number-rows-spanned="2">
            <text:p>Sistema de pensiones</text:p>
          </table:table-cell>
          <table:table-cell table:style-name="ce297" office:value-type="string" calcext:value-type="string">
            <text:p>ONP</text:p>
          </table:table-cell>
          <table:table-cell table:style-name="ce297" office:value-type="string" calcext:value-type="string">
            <text:p>aporte</text:p>
          </table:table-cell>
          <table:table-cell table:style-name="ce297" office:value-type="string" calcext:value-type="string">
            <text:p>prima</text:p>
          </table:table-cell>
          <table:table-cell table:style-name="ce297" office:value-type="string" calcext:value-type="string">
            <text:p>comision</text:p>
          </table:table-cell>
          <table:table-cell table:style-name="ce297" office:value-type="string" calcext:value-type="string">
            <text:p>esalud</text:p>
          </table:table-cell>
          <table:table-cell table:number-columns-repeated="16366"/>
        </table:table-row>
        <table:table-row table:style-name="ro13">
          <table:table-cell/>
          <table:covered-table-cell table:number-columns-repeated="12" table:style-name="ce287"/>
          <table:table-cell table:style-name="ce298" office:value-type="percentage" office:value="0.13" calcext:value-type="percentage">
            <text:p>13 %</text:p>
          </table:table-cell>
          <table:table-cell table:style-name="ce298" office:value-type="percentage" office:value="0.1" calcext:value-type="percentage">
            <text:p>10 %</text:p>
          </table:table-cell>
          <table:table-cell table:style-name="ce300" office:value-type="percentage" office:value="0.0133" calcext:value-type="percentage">
            <text:p>1.33 %</text:p>
          </table:table-cell>
          <table:table-cell table:style-name="ce300" office:value-type="percentage" office:value="0.0155" calcext:value-type="percentage">
            <text:p>1.55 %</text:p>
          </table:table-cell>
          <table:table-cell table:style-name="ce298" office:value-type="percentage" office:value="0.09" calcext:value-type="percentage">
            <text:p>9 %</text:p>
          </table:table-cell>
          <table:table-cell table:number-columns-repeated="16366"/>
        </table:table-row>
        <table:table-row table:style-name="ro13">
          <table:table-cell/>
          <table:table-cell table:style-name="ce288" office:value-type="date" office:date-value="2021-11-01" calcext:value-type="date" table:number-columns-spanned="1" table:number-rows-spanned="5">
            <text:p>nov-21</text:p>
          </table:table-cell>
          <table:table-cell table:style-name="ce291"/>
          <table:table-cell table:style-name="ce291" office:value-type="string" calcext:value-type="string">
            <text:p>GERENTE GENERAL </text:p>
          </table:table-cell>
          <table:table-cell table:style-name="ce292"/>
          <table:table-cell table:style-name="ce291" table:number-columns-repeated="2"/>
          <table:table-cell table:style-name="ce293" office:value-type="float" office:value="1500" calcext:value-type="float">
            <text:p>1,500.00</text:p>
          </table:table-cell>
          <table:table-cell table:style-name="ce293" table:number-columns-repeated="2"/>
          <table:table-cell table:style-name="ce293" office:value-type="float" office:value="406.25" calcext:value-type="float">
            <text:p>406.25</text:p>
          </table:table-cell>
          <table:table-cell table:style-name="ce293" table:formula="of:=+SUM([.H117:.K117])" office:value-type="float" office:value="1906.25" calcext:value-type="float">
            <text:p>1,906.25</text:p>
          </table:table-cell>
          <table:table-cell table:style-name="ce293"/>
          <table:table-cell table:style-name="ce293" table:formula="of:=+[.L117]*[.$N$6]" office:value-type="float" office:value="247.8125" calcext:value-type="float">
            <text:p>247.81</text:p>
          </table:table-cell>
          <table:table-cell table:style-name="ce293" table:number-columns-repeated="3"/>
          <table:table-cell table:style-name="ce293" table:formula="of:=+[.L117]*[.$R$6]" office:value-type="float" office:value="171.5625" calcext:value-type="float">
            <text:p>171.56</text:p>
          </table:table-cell>
          <table:table-cell table:number-columns-repeated="16366"/>
        </table:table-row>
        <table:table-row table:style-name="ro13">
          <table:table-cell/>
          <table:covered-table-cell table:style-name="ce289"/>
          <table:table-cell table:style-name="ce291"/>
          <table:table-cell table:style-name="ce291" office:value-type="string" calcext:value-type="string">
            <text:p>TRABAJADOR 1</text:p>
          </table:table-cell>
          <table:table-cell table:style-name="ce292"/>
          <table:table-cell table:style-name="ce291" table:number-columns-repeated="2"/>
          <table:table-cell table:style-name="ce293" office:value-type="float" office:value="930" calcext:value-type="float">
            <text:p>930.00</text:p>
          </table:table-cell>
          <table:table-cell table:style-name="ce293" table:number-columns-repeated="2"/>
          <table:table-cell table:style-name="ce293" office:value-type="float" office:value="251.875" calcext:value-type="float">
            <text:p>251.88</text:p>
          </table:table-cell>
          <table:table-cell table:style-name="ce293" table:formula="of:=+SUM([.H118:.K118])" office:value-type="float" office:value="1181.875" calcext:value-type="float">
            <text:p>1,181.88</text:p>
          </table:table-cell>
          <table:table-cell table:style-name="ce293"/>
          <table:table-cell table:style-name="ce293" table:formula="of:=+[.L118]*[.$N$6]" office:value-type="float" office:value="153.64375" calcext:value-type="float">
            <text:p>153.64</text:p>
          </table:table-cell>
          <table:table-cell table:style-name="ce293" table:number-columns-repeated="3"/>
          <table:table-cell table:style-name="ce293" table:formula="of:=+[.L118]*[.$R$6]" office:value-type="float" office:value="106.36875" calcext:value-type="float">
            <text:p>106.37</text:p>
          </table:table-cell>
          <table:table-cell table:number-columns-repeated="16366"/>
        </table:table-row>
        <table:table-row table:style-name="ro13">
          <table:table-cell/>
          <table:covered-table-cell table:style-name="ce289"/>
          <table:table-cell table:style-name="ce291"/>
          <table:table-cell table:style-name="ce291" office:value-type="string" calcext:value-type="string">
            <text:p>TRABAJADOR 2</text:p>
          </table:table-cell>
          <table:table-cell table:style-name="ce292"/>
          <table:table-cell table:style-name="ce291" table:number-columns-repeated="2"/>
          <table:table-cell table:style-name="ce293" office:value-type="float" office:value="930" calcext:value-type="float">
            <text:p>930.00</text:p>
          </table:table-cell>
          <table:table-cell table:style-name="ce293" table:number-columns-repeated="2"/>
          <table:table-cell table:style-name="ce293" office:value-type="float" office:value="251.875" calcext:value-type="float">
            <text:p>251.88</text:p>
          </table:table-cell>
          <table:table-cell table:style-name="ce293" table:formula="of:=+SUM([.H119:.K119])" office:value-type="float" office:value="1181.875" calcext:value-type="float">
            <text:p>1,181.88</text:p>
          </table:table-cell>
          <table:table-cell table:style-name="ce293"/>
          <table:table-cell table:style-name="ce293" table:formula="of:=+[.L119]*[.$N$6]" office:value-type="float" office:value="153.64375" calcext:value-type="float">
            <text:p>153.64</text:p>
          </table:table-cell>
          <table:table-cell table:style-name="ce293" table:number-columns-repeated="4"/>
          <table:table-cell table:number-columns-repeated="16366"/>
        </table:table-row>
        <table:table-row table:style-name="ro13">
          <table:table-cell/>
          <table:covered-table-cell table:style-name="ce289"/>
          <table:table-cell table:style-name="ce291"/>
          <table:table-cell table:style-name="ce291" office:value-type="string" calcext:value-type="string">
            <text:p>TRABAJADOR 3</text:p>
          </table:table-cell>
          <table:table-cell table:style-name="ce292"/>
          <table:table-cell table:style-name="ce291" table:number-columns-repeated="2"/>
          <table:table-cell table:style-name="ce293" office:value-type="float" office:value="930" calcext:value-type="float">
            <text:p>930.00</text:p>
          </table:table-cell>
          <table:table-cell table:style-name="ce293" table:number-columns-repeated="2"/>
          <table:table-cell table:style-name="ce293" office:value-type="float" office:value="251.875" calcext:value-type="float">
            <text:p>251.88</text:p>
          </table:table-cell>
          <table:table-cell table:style-name="ce293" table:formula="of:=+SUM([.H120:.K120])" office:value-type="float" office:value="1181.875" calcext:value-type="float">
            <text:p>1,181.88</text:p>
          </table:table-cell>
          <table:table-cell table:style-name="ce293"/>
          <table:table-cell table:style-name="ce293" table:formula="of:=+[.L120]*[.$N$6]" office:value-type="float" office:value="153.64375" calcext:value-type="float">
            <text:p>153.64</text:p>
          </table:table-cell>
          <table:table-cell table:style-name="ce293" table:number-columns-repeated="3"/>
          <table:table-cell table:style-name="ce293" table:formula="of:=+[.L120]*[.$R$6]" office:value-type="float" office:value="106.36875" calcext:value-type="float">
            <text:p>106.37</text:p>
          </table:table-cell>
          <table:table-cell table:number-columns-repeated="16366"/>
        </table:table-row>
        <table:table-row table:style-name="ro13">
          <table:table-cell/>
          <table:covered-table-cell table:style-name="ce290"/>
          <table:table-cell table:style-name="ce291" table:number-columns-repeated="2"/>
          <table:table-cell table:style-name="ce292"/>
          <table:table-cell table:style-name="ce291" table:number-columns-repeated="2"/>
          <table:table-cell table:style-name="ce294" table:formula="of:=+SUM([.H117:.H120])" office:value-type="float" office:value="4290" calcext:value-type="float">
            <text:p>4,290.00</text:p>
          </table:table-cell>
          <table:table-cell table:style-name="ce294" table:formula="of:=+SUM([.I117:.I120])" office:value-type="float" office:value="0" calcext:value-type="float">
            <text:p>0.00</text:p>
          </table:table-cell>
          <table:table-cell table:style-name="ce294" table:formula="of:=+SUM([.J117:.J120])" office:value-type="float" office:value="0" calcext:value-type="float">
            <text:p>0.00</text:p>
          </table:table-cell>
          <table:table-cell table:style-name="ce294" table:formula="of:=+SUM([.K117:.K120])" office:value-type="float" office:value="1161.875" calcext:value-type="float">
            <text:p>1,161.88</text:p>
          </table:table-cell>
          <table:table-cell table:style-name="ce294" table:formula="of:=+SUM([.L117:.L120])" office:value-type="float" office:value="5451.875" calcext:value-type="float">
            <text:p>5,451.88</text:p>
          </table:table-cell>
          <table:table-cell table:style-name="ce294"/>
          <table:table-cell table:style-name="ce294" table:formula="of:=+SUM([.N117:.N120])" office:value-type="float" office:value="708.74375" calcext:value-type="float">
            <text:p>708.74</text:p>
          </table:table-cell>
          <table:table-cell table:style-name="ce294" table:formula="of:=+SUM([.O117:.O120])" office:value-type="float" office:value="0" calcext:value-type="float">
            <text:p>0.00</text:p>
          </table:table-cell>
          <table:table-cell table:style-name="ce294" table:formula="of:=+SUM([.P117:.P120])" office:value-type="float" office:value="0" calcext:value-type="float">
            <text:p>0.00</text:p>
          </table:table-cell>
          <table:table-cell table:style-name="ce294" table:formula="of:=+SUM([.Q117:.Q120])" office:value-type="float" office:value="0" calcext:value-type="float">
            <text:p>0.00</text:p>
          </table:table-cell>
          <table:table-cell table:style-name="ce294" table:formula="of:=+SUM([.R117:.R120])" office:value-type="float" office:value="384.3" calcext:value-type="float">
            <text:p>384.30</text:p>
          </table:table-cell>
          <table:table-cell table:style-name="ce302" table:formula="of:=+[.O121]+[.P121]+[.Q12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3">
          <table:table-cell table:number-columns-repeated="12"/>
          <table:table-cell table:style-name="ce296" office:value-type="string" calcext:value-type="string">
            <text:p>pago</text:p>
          </table:table-cell>
          <table:table-cell table:style-name="ce296" office:value-type="float" office:value="0" calcext:value-type="float">
            <text:p>0</text:p>
          </table:table-cell>
          <table:table-cell table:number-columns-repeated="3" table:style-name="ce299" office:value-type="float" office:value="0" calcext:value-type="float">
            <text:p>0.00</text:p>
          </table:table-cell>
          <table:table-cell table:style-name="ce299" office:value-type="float" office:value="84" calcext:value-type="float">
            <text:p>84.00</text:p>
          </table:table-cell>
          <table:table-cell table:style-name="ce302" table:formula="of:=+[.L121]-[.N121]-[.S121]" office:value-type="float" office:value="4743.13125" calcext:value-type="float">
            <text:p>4743.13</text:p>
          </table:table-cell>
          <table:table-cell table:number-columns-repeated="16365"/>
        </table:table-row>
        <table:table-row table:style-name="ro13">
          <table:table-cell table:number-columns-repeated="12"/>
          <table:table-cell table:style-name="ce296" office:value-type="string" calcext:value-type="string">
            <text:p>saldo</text:p>
          </table:table-cell>
          <table:table-cell table:style-name="ce296" office:value-type="float" office:value="0" calcext:value-type="float">
            <text:p>0</text:p>
          </table:table-cell>
          <table:table-cell table:number-columns-repeated="4" table:style-name="ce299" office:value-type="float" office:value="0" calcext:value-type="float">
            <text:p>0.00</text:p>
          </table:table-cell>
          <table:table-cell table:number-columns-repeated="16366"/>
        </table:table-row>
        <table:table-row table:style-name="ro13" table:number-rows-repeated="2">
          <table:table-cell table:number-columns-repeated="16384"/>
        </table:table-row>
        <table:table-row table:style-name="ro13">
          <table:table-cell/>
          <table:table-cell table:style-name="ce286" office:value-type="string" calcext:value-type="string" table:number-columns-spanned="1" table:number-rows-spanned="2">
            <text:p>Perido</text:p>
          </table:table-cell>
          <table:table-cell table:style-name="ce286" office:value-type="string" calcext:value-type="string" table:number-columns-spanned="1" table:number-rows-spanned="2">
            <text:p>Nro</text:p>
          </table:table-cell>
          <table:table-cell table:style-name="ce286" office:value-type="string" calcext:value-type="string" table:number-columns-spanned="1" table:number-rows-spanned="2">
            <text:p>Nombre</text:p>
          </table:table-cell>
          <table:table-cell table:style-name="ce286" office:value-type="string" calcext:value-type="string" table:number-columns-spanned="1" table:number-rows-spanned="2">
            <text:p>Feha de Nac</text:p>
          </table:table-cell>
          <table:table-cell table:style-name="ce286" office:value-type="string" calcext:value-type="string" table:number-columns-spanned="1" table:number-rows-spanned="2">
            <text:p>dni</text:p>
          </table:table-cell>
          <table:table-cell table:style-name="ce286" office:value-type="string" calcext:value-type="string" table:number-columns-spanned="1" table:number-rows-spanned="2">
            <text:p>cussp</text:p>
          </table:table-cell>
          <table:table-cell table:style-name="ce286" office:value-type="string" calcext:value-type="string" table:number-columns-spanned="1" table:number-rows-spanned="2">
            <text:p>Remunerac.</text:p>
          </table:table-cell>
          <table:table-cell table:style-name="ce286" office:value-type="string" calcext:value-type="string" table:number-columns-spanned="1" table:number-rows-spanned="2">
            <text:p>Asignac. Fam.</text:p>
          </table:table-cell>
          <table:table-cell table:style-name="ce286" office:value-type="string" calcext:value-type="string" table:number-columns-spanned="1" table:number-rows-spanned="2">
            <text:p>Gratificación</text:p>
          </table:table-cell>
          <table:table-cell table:style-name="ce286" office:value-type="string" calcext:value-type="string" table:number-columns-spanned="1" table:number-rows-spanned="2">
            <text:p>Indemnizac.</text:p>
          </table:table-cell>
          <table:table-cell table:style-name="ce286" office:value-type="string" calcext:value-type="string" table:number-columns-spanned="1" table:number-rows-spanned="2">
            <text:p>Base imponible</text:p>
          </table:table-cell>
          <table:table-cell table:style-name="ce286" office:value-type="string" calcext:value-type="string" table:number-columns-spanned="1" table:number-rows-spanned="2">
            <text:p>Sistema de pensiones</text:p>
          </table:table-cell>
          <table:table-cell table:style-name="ce297" office:value-type="string" calcext:value-type="string">
            <text:p>ONP</text:p>
          </table:table-cell>
          <table:table-cell table:style-name="ce297" office:value-type="string" calcext:value-type="string">
            <text:p>aporte</text:p>
          </table:table-cell>
          <table:table-cell table:style-name="ce297" office:value-type="string" calcext:value-type="string">
            <text:p>prima</text:p>
          </table:table-cell>
          <table:table-cell table:style-name="ce297" office:value-type="string" calcext:value-type="string">
            <text:p>comision</text:p>
          </table:table-cell>
          <table:table-cell table:style-name="ce297" office:value-type="string" calcext:value-type="string">
            <text:p>esalud</text:p>
          </table:table-cell>
          <table:table-cell table:number-columns-repeated="16366"/>
        </table:table-row>
        <table:table-row table:style-name="ro13">
          <table:table-cell/>
          <table:covered-table-cell table:number-columns-repeated="12" table:style-name="ce287"/>
          <table:table-cell table:style-name="ce298" office:value-type="percentage" office:value="0.13" calcext:value-type="percentage">
            <text:p>13 %</text:p>
          </table:table-cell>
          <table:table-cell table:style-name="ce298" office:value-type="percentage" office:value="0.1" calcext:value-type="percentage">
            <text:p>10 %</text:p>
          </table:table-cell>
          <table:table-cell table:style-name="ce300" office:value-type="percentage" office:value="0.0133" calcext:value-type="percentage">
            <text:p>1.33 %</text:p>
          </table:table-cell>
          <table:table-cell table:style-name="ce300" office:value-type="percentage" office:value="0.0155" calcext:value-type="percentage">
            <text:p>1.55 %</text:p>
          </table:table-cell>
          <table:table-cell table:style-name="ce298" office:value-type="percentage" office:value="0.09" calcext:value-type="percentage">
            <text:p>9 %</text:p>
          </table:table-cell>
          <table:table-cell table:number-columns-repeated="16366"/>
        </table:table-row>
        <table:table-row table:style-name="ro13">
          <table:table-cell/>
          <table:table-cell table:style-name="ce288" office:value-type="date" office:date-value="2021-12-01" calcext:value-type="date" table:number-columns-spanned="1" table:number-rows-spanned="5">
            <text:p>dic-21</text:p>
          </table:table-cell>
          <table:table-cell table:style-name="ce291"/>
          <table:table-cell table:style-name="ce291" office:value-type="string" calcext:value-type="string">
            <text:p>GERENTE GENERAL </text:p>
          </table:table-cell>
          <table:table-cell table:style-name="ce292"/>
          <table:table-cell table:style-name="ce291" table:number-columns-repeated="2"/>
          <table:table-cell table:style-name="ce293" office:value-type="float" office:value="1500" calcext:value-type="float">
            <text:p>1,500.00</text:p>
          </table:table-cell>
          <table:table-cell table:style-name="ce293"/>
          <table:table-cell table:style-name="ce293" table:formula="of:=+[.H128]/2" office:value-type="float" office:value="750" calcext:value-type="float">
            <text:p>750.00</text:p>
          </table:table-cell>
          <table:table-cell table:style-name="ce293"/>
          <table:table-cell table:style-name="ce293" table:formula="of:=+SUM([.H128:.K128])" office:value-type="float" office:value="2250" calcext:value-type="float">
            <text:p>2,250.00</text:p>
          </table:table-cell>
          <table:table-cell table:style-name="ce293"/>
          <table:table-cell table:style-name="ce293" table:formula="of:=+[.L128]*[.$N$6]" office:value-type="float" office:value="292.5" calcext:value-type="float">
            <text:p>292.50</text:p>
          </table:table-cell>
          <table:table-cell table:style-name="ce293" table:number-columns-repeated="3"/>
          <table:table-cell table:style-name="ce293" table:formula="of:=+[.L128]*[.$R$6]" office:value-type="float" office:value="202.5" calcext:value-type="float">
            <text:p>202.50</text:p>
          </table:table-cell>
          <table:table-cell table:number-columns-repeated="16366"/>
        </table:table-row>
        <table:table-row table:style-name="ro13">
          <table:table-cell/>
          <table:covered-table-cell table:style-name="ce289"/>
          <table:table-cell table:style-name="ce291"/>
          <table:table-cell table:style-name="ce291" office:value-type="string" calcext:value-type="string">
            <text:p>TRABAJADOR 1</text:p>
          </table:table-cell>
          <table:table-cell table:style-name="ce292"/>
          <table:table-cell table:style-name="ce291" table:number-columns-repeated="2"/>
          <table:table-cell table:style-name="ce293" office:value-type="float" office:value="930" calcext:value-type="float">
            <text:p>930.00</text:p>
          </table:table-cell>
          <table:table-cell table:style-name="ce293"/>
          <table:table-cell table:style-name="ce293" table:formula="of:=+[.H129]/2" office:value-type="float" office:value="465" calcext:value-type="float">
            <text:p>465.00</text:p>
          </table:table-cell>
          <table:table-cell table:style-name="ce293"/>
          <table:table-cell table:style-name="ce293" table:formula="of:=+SUM([.H129:.K129])" office:value-type="float" office:value="1395" calcext:value-type="float">
            <text:p>1,395.00</text:p>
          </table:table-cell>
          <table:table-cell table:style-name="ce293"/>
          <table:table-cell table:style-name="ce293" table:formula="of:=+[.L129]*[.$N$6]" office:value-type="float" office:value="181.35" calcext:value-type="float">
            <text:p>181.35</text:p>
          </table:table-cell>
          <table:table-cell table:style-name="ce293" table:number-columns-repeated="3"/>
          <table:table-cell table:style-name="ce293" table:formula="of:=+[.L129]*[.$R$6]" office:value-type="float" office:value="125.55" calcext:value-type="float">
            <text:p>125.55</text:p>
          </table:table-cell>
          <table:table-cell table:number-columns-repeated="16366"/>
        </table:table-row>
        <table:table-row table:style-name="ro13">
          <table:table-cell/>
          <table:covered-table-cell table:style-name="ce289"/>
          <table:table-cell table:style-name="ce291"/>
          <table:table-cell table:style-name="ce291" office:value-type="string" calcext:value-type="string">
            <text:p>TRABAJADOR 2</text:p>
          </table:table-cell>
          <table:table-cell table:style-name="ce292"/>
          <table:table-cell table:style-name="ce291" table:number-columns-repeated="2"/>
          <table:table-cell table:style-name="ce293" office:value-type="float" office:value="930" calcext:value-type="float">
            <text:p>930.00</text:p>
          </table:table-cell>
          <table:table-cell table:style-name="ce293"/>
          <table:table-cell table:style-name="ce293" table:formula="of:=+[.H130]/2" office:value-type="float" office:value="465" calcext:value-type="float">
            <text:p>465.00</text:p>
          </table:table-cell>
          <table:table-cell table:style-name="ce293"/>
          <table:table-cell table:style-name="ce293" table:formula="of:=+SUM([.H130:.K130])" office:value-type="float" office:value="1395" calcext:value-type="float">
            <text:p>1,395.00</text:p>
          </table:table-cell>
          <table:table-cell table:style-name="ce293"/>
          <table:table-cell table:style-name="ce293" table:formula="of:=+[.L130]*[.$N$6]" office:value-type="float" office:value="181.35" calcext:value-type="float">
            <text:p>181.35</text:p>
          </table:table-cell>
          <table:table-cell table:style-name="ce293" table:number-columns-repeated="4"/>
          <table:table-cell table:number-columns-repeated="16366"/>
        </table:table-row>
        <table:table-row table:style-name="ro13">
          <table:table-cell/>
          <table:covered-table-cell table:style-name="ce289"/>
          <table:table-cell table:style-name="ce291"/>
          <table:table-cell table:style-name="ce291" office:value-type="string" calcext:value-type="string">
            <text:p>TRABAJADOR 3</text:p>
          </table:table-cell>
          <table:table-cell table:style-name="ce292"/>
          <table:table-cell table:style-name="ce291" table:number-columns-repeated="2"/>
          <table:table-cell table:style-name="ce293" office:value-type="float" office:value="930" calcext:value-type="float">
            <text:p>930.00</text:p>
          </table:table-cell>
          <table:table-cell table:style-name="ce293"/>
          <table:table-cell table:style-name="ce293" table:formula="of:=+[.H131]/2" office:value-type="float" office:value="465" calcext:value-type="float">
            <text:p>465.00</text:p>
          </table:table-cell>
          <table:table-cell table:style-name="ce293"/>
          <table:table-cell table:style-name="ce293" table:formula="of:=+SUM([.H131:.K131])" office:value-type="float" office:value="1395" calcext:value-type="float">
            <text:p>1,395.00</text:p>
          </table:table-cell>
          <table:table-cell table:style-name="ce293"/>
          <table:table-cell table:style-name="ce293" table:formula="of:=+[.L131]*[.$N$6]" office:value-type="float" office:value="181.35" calcext:value-type="float">
            <text:p>181.35</text:p>
          </table:table-cell>
          <table:table-cell table:style-name="ce293" table:number-columns-repeated="3"/>
          <table:table-cell table:style-name="ce293" table:formula="of:=+[.L131]*[.$R$6]" office:value-type="float" office:value="125.55" calcext:value-type="float">
            <text:p>125.55</text:p>
          </table:table-cell>
          <table:table-cell table:number-columns-repeated="16366"/>
        </table:table-row>
        <table:table-row table:style-name="ro13">
          <table:table-cell/>
          <table:covered-table-cell table:style-name="ce290"/>
          <table:table-cell table:style-name="ce291" table:number-columns-repeated="2"/>
          <table:table-cell table:style-name="ce292"/>
          <table:table-cell table:style-name="ce291" table:number-columns-repeated="2"/>
          <table:table-cell table:style-name="ce294" table:formula="of:=+SUM([.H128:.H131])" office:value-type="float" office:value="4290" calcext:value-type="float">
            <text:p>4,290.00</text:p>
          </table:table-cell>
          <table:table-cell table:style-name="ce294" table:formula="of:=+SUM([.I128:.I131])" office:value-type="float" office:value="0" calcext:value-type="float">
            <text:p>0.00</text:p>
          </table:table-cell>
          <table:table-cell table:style-name="ce294" table:formula="of:=+SUM([.J128:.J131])" office:value-type="float" office:value="2145" calcext:value-type="float">
            <text:p>2,145.00</text:p>
          </table:table-cell>
          <table:table-cell table:style-name="ce294" table:formula="of:=+SUM([.K128:.K131])" office:value-type="float" office:value="0" calcext:value-type="float">
            <text:p>0.00</text:p>
          </table:table-cell>
          <table:table-cell table:style-name="ce294" table:formula="of:=+SUM([.L128:.L131])" office:value-type="float" office:value="6435" calcext:value-type="float">
            <text:p>6,435.00</text:p>
          </table:table-cell>
          <table:table-cell table:style-name="ce294"/>
          <table:table-cell table:style-name="ce294" table:formula="of:=+SUM([.N128:.N131])" office:value-type="float" office:value="836.55" calcext:value-type="float">
            <text:p>836.55</text:p>
          </table:table-cell>
          <table:table-cell table:style-name="ce294" table:formula="of:=+SUM([.O128:.O131])" office:value-type="float" office:value="0" calcext:value-type="float">
            <text:p>0.00</text:p>
          </table:table-cell>
          <table:table-cell table:style-name="ce294" table:formula="of:=+SUM([.P128:.P131])" office:value-type="float" office:value="0" calcext:value-type="float">
            <text:p>0.00</text:p>
          </table:table-cell>
          <table:table-cell table:style-name="ce294" table:formula="of:=+SUM([.Q128:.Q131])" office:value-type="float" office:value="0" calcext:value-type="float">
            <text:p>0.00</text:p>
          </table:table-cell>
          <table:table-cell table:style-name="ce294" table:formula="of:=+SUM([.R128:.R131])" office:value-type="float" office:value="453.6" calcext:value-type="float">
            <text:p>453.60</text:p>
          </table:table-cell>
          <table:table-cell table:style-name="ce302" table:formula="of:=+[.O132]+[.P132]+[.Q13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3">
          <table:table-cell table:number-columns-repeated="12"/>
          <table:table-cell table:style-name="ce296" office:value-type="string" calcext:value-type="string">
            <text:p>pago</text:p>
          </table:table-cell>
          <table:table-cell table:style-name="ce296" office:value-type="float" office:value="0" calcext:value-type="float">
            <text:p>0</text:p>
          </table:table-cell>
          <table:table-cell table:number-columns-repeated="3" table:style-name="ce299" office:value-type="float" office:value="0" calcext:value-type="float">
            <text:p>0.00</text:p>
          </table:table-cell>
          <table:table-cell table:style-name="ce299" office:value-type="float" office:value="84" calcext:value-type="float">
            <text:p>84.00</text:p>
          </table:table-cell>
          <table:table-cell table:style-name="ce302" table:formula="of:=+[.L132]-[.N132]-[.S132]" office:value-type="float" office:value="5598.45" calcext:value-type="float">
            <text:p>5598.45</text:p>
          </table:table-cell>
          <table:table-cell table:number-columns-repeated="16365"/>
        </table:table-row>
        <table:table-row table:style-name="ro13">
          <table:table-cell table:number-columns-repeated="12"/>
          <table:table-cell table:style-name="ce296" office:value-type="string" calcext:value-type="string">
            <text:p>saldo</text:p>
          </table:table-cell>
          <table:table-cell table:style-name="ce296" office:value-type="float" office:value="0" calcext:value-type="float">
            <text:p>0</text:p>
          </table:table-cell>
          <table:table-cell table:number-columns-repeated="4" table:style-name="ce299" office:value-type="float" office:value="0" calcext:value-type="float">
            <text:p>0.00</text:p>
          </table:table-cell>
          <table:table-cell table:number-columns-repeated="16366"/>
        </table:table-row>
        <table:table-row table:style-name="ro13" table:number-rows-repeated="2">
          <table:table-cell table:number-columns-repeated="16384"/>
        </table:table-row>
        <table:table-row table:style-name="ro13">
          <table:table-cell/>
          <table:table-cell table:style-name="ce286" office:value-type="string" calcext:value-type="string" table:number-columns-spanned="1" table:number-rows-spanned="2">
            <text:p>Perido</text:p>
          </table:table-cell>
          <table:table-cell table:style-name="ce286" office:value-type="string" calcext:value-type="string" table:number-columns-spanned="1" table:number-rows-spanned="2">
            <text:p>Nro</text:p>
          </table:table-cell>
          <table:table-cell table:style-name="ce286" office:value-type="string" calcext:value-type="string" table:number-columns-spanned="1" table:number-rows-spanned="2">
            <text:p>Nombre</text:p>
          </table:table-cell>
          <table:table-cell table:style-name="ce286" office:value-type="string" calcext:value-type="string" table:number-columns-spanned="1" table:number-rows-spanned="2">
            <text:p>Feha de Nac</text:p>
          </table:table-cell>
          <table:table-cell table:style-name="ce286" office:value-type="string" calcext:value-type="string" table:number-columns-spanned="1" table:number-rows-spanned="2">
            <text:p>dni</text:p>
          </table:table-cell>
          <table:table-cell table:style-name="ce286" office:value-type="string" calcext:value-type="string" table:number-columns-spanned="1" table:number-rows-spanned="2">
            <text:p>cussp</text:p>
          </table:table-cell>
          <table:table-cell table:style-name="ce286" office:value-type="string" calcext:value-type="string" table:number-columns-spanned="1" table:number-rows-spanned="2">
            <text:p>Remunerac.</text:p>
          </table:table-cell>
          <table:table-cell table:style-name="ce286" office:value-type="string" calcext:value-type="string" table:number-columns-spanned="1" table:number-rows-spanned="2">
            <text:p>Asignac. Fam.</text:p>
          </table:table-cell>
          <table:table-cell table:style-name="ce286" office:value-type="string" calcext:value-type="string" table:number-columns-spanned="1" table:number-rows-spanned="2">
            <text:p>Gratificación</text:p>
          </table:table-cell>
          <table:table-cell table:style-name="ce286" office:value-type="string" calcext:value-type="string" table:number-columns-spanned="1" table:number-rows-spanned="2">
            <text:p>Indemnizac.</text:p>
          </table:table-cell>
          <table:table-cell table:style-name="ce286" office:value-type="string" calcext:value-type="string" table:number-columns-spanned="1" table:number-rows-spanned="2">
            <text:p>Base imponible</text:p>
          </table:table-cell>
          <table:table-cell table:style-name="ce286" office:value-type="string" calcext:value-type="string" table:number-columns-spanned="1" table:number-rows-spanned="2">
            <text:p>Sistema de pensiones</text:p>
          </table:table-cell>
          <table:table-cell table:style-name="ce297" office:value-type="string" calcext:value-type="string">
            <text:p>ONP</text:p>
          </table:table-cell>
          <table:table-cell table:style-name="ce297" office:value-type="string" calcext:value-type="string">
            <text:p>aporte</text:p>
          </table:table-cell>
          <table:table-cell table:style-name="ce297" office:value-type="string" calcext:value-type="string">
            <text:p>prima</text:p>
          </table:table-cell>
          <table:table-cell table:style-name="ce297" office:value-type="string" calcext:value-type="string">
            <text:p>comision</text:p>
          </table:table-cell>
          <table:table-cell table:style-name="ce297" office:value-type="string" calcext:value-type="string">
            <text:p>esalud</text:p>
          </table:table-cell>
          <table:table-cell table:number-columns-repeated="16366"/>
        </table:table-row>
        <table:table-row table:style-name="ro13">
          <table:table-cell/>
          <table:covered-table-cell table:number-columns-repeated="12" table:style-name="ce287"/>
          <table:table-cell table:style-name="ce298" office:value-type="percentage" office:value="0.13" calcext:value-type="percentage">
            <text:p>13 %</text:p>
          </table:table-cell>
          <table:table-cell table:style-name="ce298" office:value-type="percentage" office:value="0.1" calcext:value-type="percentage">
            <text:p>10 %</text:p>
          </table:table-cell>
          <table:table-cell table:style-name="ce300" office:value-type="percentage" office:value="0.0133" calcext:value-type="percentage">
            <text:p>1.33 %</text:p>
          </table:table-cell>
          <table:table-cell table:style-name="ce300" office:value-type="percentage" office:value="0.0155" calcext:value-type="percentage">
            <text:p>1.55 %</text:p>
          </table:table-cell>
          <table:table-cell table:style-name="ce298" office:value-type="percentage" office:value="0.09" calcext:value-type="percentage">
            <text:p>9 %</text:p>
          </table:table-cell>
          <table:table-cell table:number-columns-repeated="16366"/>
        </table:table-row>
        <table:table-row table:style-name="ro13">
          <table:table-cell/>
          <table:table-cell table:style-name="ce288" office:value-type="string" calcext:value-type="string" table:number-columns-spanned="1" table:number-rows-spanned="5">
            <text:p>ANUAL</text:p>
          </table:table-cell>
          <table:table-cell table:style-name="ce291"/>
          <table:table-cell table:style-name="ce291" office:value-type="string" calcext:value-type="string">
            <text:p>GERENTE GENERAL </text:p>
          </table:table-cell>
          <table:table-cell table:style-name="ce292"/>
          <table:table-cell table:style-name="ce291" table:number-columns-repeated="2"/>
          <table:table-cell table:style-name="ce293" table:formula="of:=+[.H7]+[.H18]+[.H40]+[.H51]+[.H62]+[.H73]+[.H84]+[.H95]+[.H106]+[.H117]+[.H128]+[.H29]" office:value-type="float" office:value="18000" calcext:value-type="float">
            <text:p>18,000.00</text:p>
          </table:table-cell>
          <table:table-cell table:style-name="ce293" table:formula="of:=+[.I7]+[.I18]+[.I40]+[.I51]+[.I62]+[.I73]+[.I84]+[.I95]+[.I106]+[.I117]+[.I128]+[.I29]" office:value-type="float" office:value="0" calcext:value-type="float">
            <text:p>0.00</text:p>
          </table:table-cell>
          <table:table-cell table:style-name="ce293" table:formula="of:=+[.J7]+[.J18]+[.J40]+[.J51]+[.J62]+[.J73]+[.J84]+[.J95]+[.J106]+[.J117]+[.J128]+[.J29]" office:value-type="float" office:value="1500" calcext:value-type="float">
            <text:p>1,500.00</text:p>
          </table:table-cell>
          <table:table-cell table:style-name="ce293" table:formula="of:=+[.K7]+[.K18]+[.K40]+[.K51]+[.K62]+[.K73]+[.K84]+[.K95]+[.K106]+[.K117]+[.K128]+[.K29]" office:value-type="float" office:value="812.5" calcext:value-type="float">
            <text:p>812.50</text:p>
          </table:table-cell>
          <table:table-cell table:style-name="ce293" table:formula="of:=+[.L7]+[.L18]+[.L40]+[.L51]+[.L62]+[.L73]+[.L84]+[.L95]+[.L106]+[.L117]+[.L128]+[.L29]" office:value-type="float" office:value="20312.5" calcext:value-type="float">
            <text:p>20,312.50</text:p>
          </table:table-cell>
          <table:table-cell table:style-name="ce293" table:formula="of:=+[.M7]+[.M18]+[.M40]+[.M51]+[.M62]+[.M73]+[.M84]+[.M95]+[.M106]+[.M117]+[.M128]+[.M29]" office:value-type="float" office:value="0" calcext:value-type="float">
            <text:p>0.00</text:p>
          </table:table-cell>
          <table:table-cell table:style-name="ce293" table:formula="of:=+[.N7]+[.N18]+[.N40]+[.N51]+[.N62]+[.N73]+[.N84]+[.N95]+[.N106]+[.N117]+[.N128]+[.N29]" office:value-type="float" office:value="2640.625" calcext:value-type="float">
            <text:p>2,640.63</text:p>
          </table:table-cell>
          <table:table-cell table:style-name="ce293" table:formula="of:=+[.O7]+[.O18]+[.O40]+[.O51]+[.O62]+[.O73]+[.O84]+[.O95]+[.O106]+[.O117]+[.O128]+[.O29]" office:value-type="float" office:value="0" calcext:value-type="float">
            <text:p>0.00</text:p>
          </table:table-cell>
          <table:table-cell table:style-name="ce293" table:formula="of:=+[.P7]+[.P18]+[.P40]+[.P51]+[.P62]+[.P73]+[.P84]+[.P95]+[.P106]+[.P117]+[.P128]+[.P29]" office:value-type="float" office:value="0" calcext:value-type="float">
            <text:p>0.00</text:p>
          </table:table-cell>
          <table:table-cell table:style-name="ce293" table:formula="of:=+[.Q7]+[.Q18]+[.Q40]+[.Q51]+[.Q62]+[.Q73]+[.Q84]+[.Q95]+[.Q106]+[.Q117]+[.Q128]+[.Q29]" office:value-type="float" office:value="0" calcext:value-type="float">
            <text:p>0.00</text:p>
          </table:table-cell>
          <table:table-cell table:style-name="ce293" table:formula="of:=+[.R7]+[.R18]+[.R40]+[.R51]+[.R62]+[.R73]+[.R84]+[.R95]+[.R106]+[.R117]+[.R128]+[.R29]" office:value-type="float" office:value="1828.125" calcext:value-type="float">
            <text:p>1,828.13</text:p>
          </table:table-cell>
          <table:table-cell table:number-columns-repeated="16366"/>
        </table:table-row>
        <table:table-row table:style-name="ro13">
          <table:table-cell/>
          <table:covered-table-cell table:style-name="ce289"/>
          <table:table-cell table:style-name="ce291"/>
          <table:table-cell table:style-name="ce291" office:value-type="string" calcext:value-type="string">
            <text:p>TRABAJADOR 1</text:p>
          </table:table-cell>
          <table:table-cell table:style-name="ce292"/>
          <table:table-cell table:style-name="ce291" table:number-columns-repeated="2"/>
          <table:table-cell table:style-name="ce293" table:formula="of:=+[.H8]+[.H19]+[.H41]+[.H52]+[.H63]+[.H74]+[.H85]+[.H96]+[.H107]+[.H118]+[.H129]+[.H30]" office:value-type="float" office:value="11160" calcext:value-type="float">
            <text:p>11,160.00</text:p>
          </table:table-cell>
          <table:table-cell table:style-name="ce293" table:formula="of:=+[.I8]+[.I19]+[.I41]+[.I52]+[.I63]+[.I74]+[.I85]+[.I96]+[.I107]+[.I118]+[.I129]+[.I30]" office:value-type="float" office:value="0" calcext:value-type="float">
            <text:p>0.00</text:p>
          </table:table-cell>
          <table:table-cell table:style-name="ce293" table:formula="of:=+[.J8]+[.J19]+[.J41]+[.J52]+[.J63]+[.J74]+[.J85]+[.J96]+[.J107]+[.J118]+[.J129]+[.J30]" office:value-type="float" office:value="930" calcext:value-type="float">
            <text:p>930.00</text:p>
          </table:table-cell>
          <table:table-cell table:style-name="ce293" table:formula="of:=+[.K8]+[.K19]+[.K41]+[.K52]+[.K63]+[.K74]+[.K85]+[.K96]+[.K107]+[.K118]+[.K129]+[.K30]" office:value-type="float" office:value="503.75" calcext:value-type="float">
            <text:p>503.75</text:p>
          </table:table-cell>
          <table:table-cell table:style-name="ce293" table:formula="of:=+[.L8]+[.L19]+[.L41]+[.L52]+[.L63]+[.L74]+[.L85]+[.L96]+[.L107]+[.L118]+[.L129]+[.L30]" office:value-type="float" office:value="12593.75" calcext:value-type="float">
            <text:p>12,593.75</text:p>
          </table:table-cell>
          <table:table-cell table:style-name="ce293" table:formula="of:=+[.M8]+[.M19]+[.M41]+[.M52]+[.M63]+[.M74]+[.M85]+[.M96]+[.M107]+[.M118]+[.M129]+[.M30]" office:value-type="float" office:value="0" calcext:value-type="float">
            <text:p>0.00</text:p>
          </table:table-cell>
          <table:table-cell table:style-name="ce293" table:formula="of:=+[.N8]+[.N19]+[.N41]+[.N52]+[.N63]+[.N74]+[.N85]+[.N96]+[.N107]+[.N118]+[.N129]+[.N30]" office:value-type="float" office:value="1637.1875" calcext:value-type="float">
            <text:p>1,637.19</text:p>
          </table:table-cell>
          <table:table-cell table:style-name="ce293" table:formula="of:=+[.O8]+[.O19]+[.O41]+[.O52]+[.O63]+[.O74]+[.O85]+[.O96]+[.O107]+[.O118]+[.O129]+[.O30]" office:value-type="float" office:value="0" calcext:value-type="float">
            <text:p>0.00</text:p>
          </table:table-cell>
          <table:table-cell table:style-name="ce293" table:formula="of:=+[.P8]+[.P19]+[.P41]+[.P52]+[.P63]+[.P74]+[.P85]+[.P96]+[.P107]+[.P118]+[.P129]+[.P30]" office:value-type="float" office:value="0" calcext:value-type="float">
            <text:p>0.00</text:p>
          </table:table-cell>
          <table:table-cell table:style-name="ce293" table:formula="of:=+[.Q8]+[.Q19]+[.Q41]+[.Q52]+[.Q63]+[.Q74]+[.Q85]+[.Q96]+[.Q107]+[.Q118]+[.Q129]+[.Q30]" office:value-type="float" office:value="0" calcext:value-type="float">
            <text:p>0.00</text:p>
          </table:table-cell>
          <table:table-cell table:style-name="ce293" table:formula="of:=+[.R8]+[.R19]+[.R41]+[.R52]+[.R63]+[.R74]+[.R85]+[.R96]+[.R107]+[.R118]+[.R129]+[.R30]" office:value-type="float" office:value="399.31875" calcext:value-type="float">
            <text:p>399.32</text:p>
          </table:table-cell>
          <table:table-cell table:number-columns-repeated="16366"/>
        </table:table-row>
        <table:table-row table:style-name="ro13">
          <table:table-cell/>
          <table:covered-table-cell table:style-name="ce289"/>
          <table:table-cell table:style-name="ce291"/>
          <table:table-cell table:style-name="ce291" office:value-type="string" calcext:value-type="string">
            <text:p>TRABAJADOR 2</text:p>
          </table:table-cell>
          <table:table-cell table:style-name="ce292"/>
          <table:table-cell table:style-name="ce291" table:number-columns-repeated="2"/>
          <table:table-cell table:style-name="ce293" table:formula="of:=+[.H9]+[.H20]+[.H42]+[.H53]+[.H64]+[.H75]+[.H86]+[.H97]+[.H108]+[.H119]+[.H130]+[.H31]" office:value-type="float" office:value="11160" calcext:value-type="float">
            <text:p>11,160.00</text:p>
          </table:table-cell>
          <table:table-cell table:style-name="ce293" table:formula="of:=+[.I9]+[.I20]+[.I42]+[.I53]+[.I64]+[.I75]+[.I86]+[.I97]+[.I108]+[.I119]+[.I130]+[.I31]" office:value-type="float" office:value="0" calcext:value-type="float">
            <text:p>0.00</text:p>
          </table:table-cell>
          <table:table-cell table:style-name="ce293" table:formula="of:=+[.J9]+[.J20]+[.J42]+[.J53]+[.J64]+[.J75]+[.J86]+[.J97]+[.J108]+[.J119]+[.J130]+[.J31]" office:value-type="float" office:value="930" calcext:value-type="float">
            <text:p>930.00</text:p>
          </table:table-cell>
          <table:table-cell table:style-name="ce293" table:formula="of:=+[.K9]+[.K20]+[.K42]+[.K53]+[.K64]+[.K75]+[.K86]+[.K97]+[.K108]+[.K119]+[.K130]+[.K31]" office:value-type="float" office:value="503.75" calcext:value-type="float">
            <text:p>503.75</text:p>
          </table:table-cell>
          <table:table-cell table:style-name="ce293" table:formula="of:=+[.L9]+[.L20]+[.L42]+[.L53]+[.L64]+[.L75]+[.L86]+[.L97]+[.L108]+[.L119]+[.L130]+[.L31]" office:value-type="float" office:value="12593.75" calcext:value-type="float">
            <text:p>12,593.75</text:p>
          </table:table-cell>
          <table:table-cell table:style-name="ce293" table:formula="of:=+[.M9]+[.M20]+[.M42]+[.M53]+[.M64]+[.M75]+[.M86]+[.M97]+[.M108]+[.M119]+[.M130]+[.M31]" office:value-type="float" office:value="0" calcext:value-type="float">
            <text:p>0.00</text:p>
          </table:table-cell>
          <table:table-cell table:style-name="ce293" table:formula="of:=+[.N9]+[.N20]+[.N42]+[.N53]+[.N64]+[.N75]+[.N86]+[.N97]+[.N108]+[.N119]+[.N130]+[.N31]" office:value-type="float" office:value="1637.1875" calcext:value-type="float">
            <text:p>1,637.19</text:p>
          </table:table-cell>
          <table:table-cell table:style-name="ce293" table:formula="of:=+[.O9]+[.O20]+[.O42]+[.O53]+[.O64]+[.O75]+[.O86]+[.O97]+[.O108]+[.O119]+[.O130]+[.O31]" office:value-type="float" office:value="0" calcext:value-type="float">
            <text:p>0.00</text:p>
          </table:table-cell>
          <table:table-cell table:style-name="ce293" table:formula="of:=+[.P9]+[.P20]+[.P42]+[.P53]+[.P64]+[.P75]+[.P86]+[.P97]+[.P108]+[.P119]+[.P130]+[.P31]" office:value-type="float" office:value="0" calcext:value-type="float">
            <text:p>0.00</text:p>
          </table:table-cell>
          <table:table-cell table:style-name="ce293" table:formula="of:=+[.Q9]+[.Q20]+[.Q42]+[.Q53]+[.Q64]+[.Q75]+[.Q86]+[.Q97]+[.Q108]+[.Q119]+[.Q130]+[.Q31]" office:value-type="float" office:value="0" calcext:value-type="float">
            <text:p>0.00</text:p>
          </table:table-cell>
          <table:table-cell table:style-name="ce293" table:formula="of:=+[.R9]+[.R20]+[.R42]+[.R53]+[.R64]+[.R75]+[.R86]+[.R97]+[.R108]+[.R119]+[.R130]+[.R31]" office:value-type="float" office:value="901.51875" calcext:value-type="float">
            <text:p>901.52</text:p>
          </table:table-cell>
          <table:table-cell table:number-columns-repeated="16366"/>
        </table:table-row>
        <table:table-row table:style-name="ro13">
          <table:table-cell/>
          <table:covered-table-cell table:style-name="ce289"/>
          <table:table-cell table:style-name="ce291"/>
          <table:table-cell table:style-name="ce291" office:value-type="string" calcext:value-type="string">
            <text:p>TRABAJADOR 3</text:p>
          </table:table-cell>
          <table:table-cell table:style-name="ce292"/>
          <table:table-cell table:style-name="ce291" table:number-columns-repeated="2"/>
          <table:table-cell table:style-name="ce293" table:formula="of:=+[.H10]+[.H21]+[.H43]+[.H54]+[.H65]+[.H76]+[.H87]+[.H98]+[.H109]+[.H120]+[.H131]+[.H32]" office:value-type="float" office:value="11160" calcext:value-type="float">
            <text:p>11,160.00</text:p>
          </table:table-cell>
          <table:table-cell table:style-name="ce293" table:formula="of:=+[.I10]+[.I21]+[.I43]+[.I54]+[.I65]+[.I76]+[.I87]+[.I98]+[.I109]+[.I120]+[.I131]+[.I32]" office:value-type="float" office:value="0" calcext:value-type="float">
            <text:p>0.00</text:p>
          </table:table-cell>
          <table:table-cell table:style-name="ce293" table:formula="of:=+[.J10]+[.J21]+[.J43]+[.J54]+[.J65]+[.J76]+[.J87]+[.J98]+[.J109]+[.J120]+[.J131]+[.J32]" office:value-type="float" office:value="930" calcext:value-type="float">
            <text:p>930.00</text:p>
          </table:table-cell>
          <table:table-cell table:style-name="ce293" table:formula="of:=+[.K10]+[.K21]+[.K43]+[.K54]+[.K65]+[.K76]+[.K87]+[.K98]+[.K109]+[.K120]+[.K131]+[.K32]" office:value-type="float" office:value="503.75" calcext:value-type="float">
            <text:p>503.75</text:p>
          </table:table-cell>
          <table:table-cell table:style-name="ce293" table:formula="of:=+[.L10]+[.L21]+[.L43]+[.L54]+[.L65]+[.L76]+[.L87]+[.L98]+[.L109]+[.L120]+[.L131]+[.L32]" office:value-type="float" office:value="12593.75" calcext:value-type="float">
            <text:p>12,593.75</text:p>
          </table:table-cell>
          <table:table-cell table:style-name="ce293" table:formula="of:=+[.M10]+[.M21]+[.M43]+[.M54]+[.M65]+[.M76]+[.M87]+[.M98]+[.M109]+[.M120]+[.M131]+[.M32]" office:value-type="float" office:value="0" calcext:value-type="float">
            <text:p>0.00</text:p>
          </table:table-cell>
          <table:table-cell table:style-name="ce293" table:formula="of:=+[.N10]+[.N21]+[.N43]+[.N54]+[.N65]+[.N76]+[.N87]+[.N98]+[.N109]+[.N120]+[.N131]+[.N32]" office:value-type="float" office:value="1637.1875" calcext:value-type="float">
            <text:p>1,637.19</text:p>
          </table:table-cell>
          <table:table-cell table:style-name="ce293" table:formula="of:=+[.O10]+[.O21]+[.O43]+[.O54]+[.O65]+[.O76]+[.O87]+[.O98]+[.O109]+[.O120]+[.O131]+[.O32]" office:value-type="float" office:value="0" calcext:value-type="float">
            <text:p>0.00</text:p>
          </table:table-cell>
          <table:table-cell table:style-name="ce293" table:formula="of:=+[.P10]+[.P21]+[.P43]+[.P54]+[.P65]+[.P76]+[.P87]+[.P98]+[.P109]+[.P120]+[.P131]+[.P32]" office:value-type="float" office:value="0" calcext:value-type="float">
            <text:p>0.00</text:p>
          </table:table-cell>
          <table:table-cell table:style-name="ce293" table:formula="of:=+[.Q10]+[.Q21]+[.Q43]+[.Q54]+[.Q65]+[.Q76]+[.Q87]+[.Q98]+[.Q109]+[.Q120]+[.Q131]+[.Q32]" office:value-type="float" office:value="0" calcext:value-type="float">
            <text:p>0.00</text:p>
          </table:table-cell>
          <table:table-cell table:style-name="ce293" table:formula="of:=+[.R10]+[.R21]+[.R43]+[.R54]+[.R65]+[.R76]+[.R87]+[.R98]+[.R109]+[.R120]+[.R131]+[.R32]" office:value-type="float" office:value="1133.4375" calcext:value-type="float">
            <text:p>1,133.44</text:p>
          </table:table-cell>
          <table:table-cell table:number-columns-repeated="16366"/>
        </table:table-row>
        <table:table-row table:style-name="ro13">
          <table:table-cell/>
          <table:covered-table-cell table:style-name="ce290"/>
          <table:table-cell table:style-name="ce291" table:number-columns-repeated="2"/>
          <table:table-cell table:style-name="ce292"/>
          <table:table-cell table:style-name="ce291" table:number-columns-repeated="2"/>
          <table:table-cell table:style-name="ce294" table:formula="of:=+SUM([.H139:.H142])" office:value-type="float" office:value="51480" calcext:value-type="float">
            <text:p>51,480.00</text:p>
          </table:table-cell>
          <table:table-cell table:style-name="ce294" table:formula="of:=+SUM([.I139:.I142])" office:value-type="float" office:value="0" calcext:value-type="float">
            <text:p>0.00</text:p>
          </table:table-cell>
          <table:table-cell table:style-name="ce294" table:formula="of:=+SUM([.J139:.J142])" office:value-type="float" office:value="4290" calcext:value-type="float">
            <text:p>4,290.00</text:p>
          </table:table-cell>
          <table:table-cell table:style-name="ce294" table:formula="of:=+SUM([.K139:.K142])" office:value-type="float" office:value="2323.75" calcext:value-type="float">
            <text:p>2,323.75</text:p>
          </table:table-cell>
          <table:table-cell table:style-name="ce294" table:formula="of:=+SUM([.L139:.L142])" office:value-type="float" office:value="58093.75" calcext:value-type="float">
            <text:p>58,093.75</text:p>
          </table:table-cell>
          <table:table-cell table:style-name="ce294"/>
          <table:table-cell table:style-name="ce294" table:formula="of:=+SUM([.N139:.N142])" office:value-type="float" office:value="7552.1875" calcext:value-type="float">
            <text:p>7,552.19</text:p>
          </table:table-cell>
          <table:table-cell table:style-name="ce294" table:formula="of:=+SUM([.O139:.O142])" office:value-type="float" office:value="0" calcext:value-type="float">
            <text:p>0.00</text:p>
          </table:table-cell>
          <table:table-cell table:style-name="ce294" table:formula="of:=+SUM([.P139:.P142])" office:value-type="float" office:value="0" calcext:value-type="float">
            <text:p>0.00</text:p>
          </table:table-cell>
          <table:table-cell table:style-name="ce294" table:formula="of:=+SUM([.Q139:.Q142])" office:value-type="float" office:value="0" calcext:value-type="float">
            <text:p>0.00</text:p>
          </table:table-cell>
          <table:table-cell table:style-name="ce294" table:formula="of:=+SUM([.R139:.R142])" office:value-type="float" office:value="4262.4" calcext:value-type="float">
            <text:p>4,262.40</text:p>
          </table:table-cell>
          <table:table-cell table:number-columns-repeated="16366"/>
        </table:table-row>
        <table:table-row table:style-name="ro13" table:number-rows-repeated="9">
          <table:table-cell table:number-columns-repeated="16384"/>
        </table:table-row>
        <table:table-row table:style-name="ro9">
          <table:table-cell table:number-columns-repeated="7"/>
          <table:table-cell table:style-name="ce286" office:value-type="string" calcext:value-type="string" table:number-columns-spanned="1" table:number-rows-spanned="2">
            <text:p>Remunerac.</text:p>
          </table:table-cell>
          <table:table-cell table:style-name="ce286" office:value-type="string" calcext:value-type="string" table:number-columns-spanned="1" table:number-rows-spanned="2">
            <text:p>Asignac. Fam.</text:p>
          </table:table-cell>
          <table:table-cell table:style-name="ce286" office:value-type="string" calcext:value-type="string" table:number-columns-spanned="1" table:number-rows-spanned="2">
            <text:p>Gratificación</text:p>
          </table:table-cell>
          <table:table-cell table:style-name="ce286" office:value-type="string" calcext:value-type="string" table:number-columns-spanned="1" table:number-rows-spanned="2">
            <text:p>CTS</text:p>
          </table:table-cell>
          <table:table-cell table:style-name="ce286" office:value-type="string" calcext:value-type="string" table:number-columns-spanned="1" table:number-rows-spanned="2">
            <text:p>Base imponible</text:p>
          </table:table-cell>
          <table:table-cell/>
          <table:table-cell table:style-name="ce297" office:value-type="string" calcext:value-type="string">
            <text:p>ONP</text:p>
          </table:table-cell>
          <table:table-cell table:style-name="ce297" office:value-type="string" calcext:value-type="string">
            <text:p>aporte</text:p>
          </table:table-cell>
          <table:table-cell table:style-name="ce297" office:value-type="string" calcext:value-type="string">
            <text:p>prima</text:p>
          </table:table-cell>
          <table:table-cell table:style-name="ce297" office:value-type="string" calcext:value-type="string">
            <text:p>comision</text:p>
          </table:table-cell>
          <table:table-cell table:style-name="ce297" office:value-type="string" calcext:value-type="string">
            <text:p>esalud</text:p>
          </table:table-cell>
          <table:table-cell table:number-columns-repeated="16366"/>
        </table:table-row>
        <table:table-row table:style-name="ro13">
          <table:table-cell table:number-columns-repeated="7"/>
          <table:covered-table-cell table:number-columns-repeated="5" table:style-name="ce287"/>
          <table:table-cell/>
          <table:table-cell table:style-name="ce298" office:value-type="percentage" office:value="0.13" calcext:value-type="percentage">
            <text:p>13 %</text:p>
          </table:table-cell>
          <table:table-cell table:style-name="ce298" office:value-type="percentage" office:value="0.1" calcext:value-type="percentage">
            <text:p>10 %</text:p>
          </table:table-cell>
          <table:table-cell table:style-name="ce300" office:value-type="percentage" office:value="0.0133" calcext:value-type="percentage">
            <text:p>1.33 %</text:p>
          </table:table-cell>
          <table:table-cell table:style-name="ce300" office:value-type="percentage" office:value="0.0155" calcext:value-type="percentage">
            <text:p>1.55 %</text:p>
          </table:table-cell>
          <table:table-cell table:style-name="ce298" office:value-type="percentage" office:value="0.09" calcext:value-type="percentage">
            <text:p>9 %</text:p>
          </table:table-cell>
          <table:table-cell table:number-columns-repeated="16366"/>
        </table:table-row>
        <table:table-row table:style-name="ro13">
          <table:table-cell table:number-columns-repeated="6"/>
          <table:table-cell table:style-name="ce285" office:value-type="string" calcext:value-type="string">
            <text:p>TOTAL AÑO</text:p>
          </table:table-cell>
          <table:table-cell table:style-name="ce293" table:formula="of:=+[.H11]+[.H22]+[.H33]+[.H44]+[.H55]+[.H66]+[.H77]+[.H88]+[.H99]+[.H110]+[.H121]+[.H132]" office:value-type="float" office:value="51480" calcext:value-type="float">
            <text:p>51,480.00</text:p>
          </table:table-cell>
          <table:table-cell table:style-name="ce293" table:formula="of:=+[.I11]+[.I22]+[.I33]+[.I44]+[.I55]+[.I66]+[.I77]+[.I88]+[.I99]+[.I110]+[.I121]+[.I132]" office:value-type="float" office:value="0" calcext:value-type="float">
            <text:p>0.00</text:p>
          </table:table-cell>
          <table:table-cell table:style-name="ce293" table:formula="of:=+[.J11]+[.J22]+[.J33]+[.J44]+[.J55]+[.J66]+[.J77]+[.J88]+[.J99]+[.J110]+[.J121]+[.J132]" office:value-type="float" office:value="4290" calcext:value-type="float">
            <text:p>4,290.00</text:p>
          </table:table-cell>
          <table:table-cell table:style-name="ce293" table:formula="of:=+[.K11]+[.K22]+[.K33]+[.K44]+[.K55]+[.K66]+[.K77]+[.K88]+[.K99]+[.K110]+[.K121]+[.K132]" office:value-type="float" office:value="2323.75" calcext:value-type="float">
            <text:p>2,323.75</text:p>
          </table:table-cell>
          <table:table-cell table:style-name="ce293" table:formula="of:=+[.L11]+[.L22]+[.L33]+[.L44]+[.L55]+[.L66]+[.L77]+[.L88]+[.L99]+[.L110]+[.L121]+[.L132]" office:value-type="float" office:value="58093.75" calcext:value-type="float">
            <text:p>58,093.75</text:p>
          </table:table-cell>
          <table:table-cell/>
          <table:table-cell table:style-name="ce293" table:formula="of:=+[.N11]+[.N22]+[.N33]+[.N44]+[.N55]+[.N66]+[.N77]+[.N88]+[.N99]+[.N110]+[.N121]+[.N132]" office:value-type="float" office:value="7552.1875" calcext:value-type="float">
            <text:p>7,552.19</text:p>
          </table:table-cell>
          <table:table-cell table:style-name="ce293" table:formula="of:=+[.O11]+[.O22]+[.O33]+[.O44]+[.O55]+[.O66]+[.O77]+[.O88]+[.O99]+[.O110]+[.O121]+[.O132]" office:value-type="float" office:value="0" calcext:value-type="float">
            <text:p>0.00</text:p>
          </table:table-cell>
          <table:table-cell table:style-name="ce293" table:formula="of:=+[.P11]+[.P22]+[.P33]+[.P44]+[.P55]+[.P66]+[.P77]+[.P88]+[.P99]+[.P110]+[.P121]+[.P132]" office:value-type="float" office:value="0" calcext:value-type="float">
            <text:p>0.00</text:p>
          </table:table-cell>
          <table:table-cell table:style-name="ce293" table:formula="of:=+[.Q11]+[.Q22]+[.Q33]+[.Q44]+[.Q55]+[.Q66]+[.Q77]+[.Q88]+[.Q99]+[.Q110]+[.Q121]+[.Q132]" office:value-type="float" office:value="0" calcext:value-type="float">
            <text:p>0.00</text:p>
          </table:table-cell>
          <table:table-cell table:style-name="ce293" table:formula="of:=+[.R11]+[.R22]+[.R33]+[.R44]+[.R55]+[.R66]+[.R77]+[.R88]+[.R99]+[.R110]+[.R121]+[.R132]" office:value-type="float" office:value="4262.4" calcext:value-type="float">
            <text:p>4,262.40</text:p>
          </table:table-cell>
          <table:table-cell table:style-name="ce302" table:formula="of:=+[.O155]+[.P155]+[.Q15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3">
          <table:table-cell table:number-columns-repeated="11"/>
          <table:table-cell table:style-name="ce295"/>
          <table:table-cell table:number-columns-repeated="6"/>
          <table:table-cell table:style-name="ce302" table:formula="of:=+[.L155]-[.N155]-[.S155]" office:value-type="float" office:value="50541.5625" calcext:value-type="float">
            <text:p>50541.56</text:p>
          </table:table-cell>
          <table:table-cell table:number-columns-repeated="16365"/>
        </table:table-row>
        <table:table-row table:style-name="ro13" table:number-rows-repeated="1048419">
          <table:table-cell table:number-columns-repeated="16384"/>
        </table:table-row>
        <table:table-row table:style-name="ro13">
          <table:table-cell table:number-columns-repeated="16384"/>
        </table:table-row>
        <table:named-expressions>
          <table:named-expression table:name="Precio_Materia_Prima" table:base-cell-address="$'Resumen del escenario 2'.$A$1" table:expression="#REF!"/>
          <table:named-expression table:name="Precio_Queso_Maduro" table:base-cell-address="$'Resumen del escenario 2'.$A$1" table:expression="#REF!"/>
          <table:named-expression table:name="Precio_retablo_unidad" table:base-cell-address="$'Resumen del escenario 2'.$A$1" table:expression="#REF!"/>
          <table:named-expression table:name="TIRE" table:base-cell-address="$'Resumen del escenario 2'.$A$1" table:expression="#REF!"/>
          <table:named-expression table:name="TIRF" table:base-cell-address="$'Resumen del escenario 2'.$A$1" table:expression="#REF!"/>
          <table:named-expression table:name="VANE" table:base-cell-address="$'Resumen del escenario 2'.$A$1" table:expression="#REF!"/>
          <table:named-expression table:name="VANF" table:base-cell-address="$'Resumen del escenario 2'.$A$1" table:expression="#REF!"/>
        </table:named-expressions>
      </table:table>
      <table:table table:name="Gastos_Operativos" table:style-name="ta11">
        <table:table-column table:style-name="co30" table:default-cell-style-name="ce308"/>
        <table:table-column table:style-name="co35" table:default-cell-style-name="ce308"/>
        <table:table-column table:style-name="co36" table:number-columns-repeated="5" table:default-cell-style-name="ce308"/>
        <table:table-column table:style-name="co12" table:number-columns-repeated="12" table:default-cell-style-name="ce308"/>
        <table:table-column table:style-name="co29" table:number-columns-repeated="16365" table:default-cell-style-name="ce308"/>
        <table:table-row table:style-name="ro9">
          <table:table-cell table:style-name="ce307" table:number-columns-repeated="19"/>
          <table:table-cell table:number-columns-repeated="16365"/>
        </table:table-row>
        <table:table-row table:style-name="ro4">
          <table:table-cell table:style-name="ce307"/>
          <table:table-cell table:style-name="ce309" table:number-columns-spanned="6" table:number-rows-spanned="1"/>
          <table:covered-table-cell table:number-columns-repeated="5" table:style-name="ce320"/>
          <table:table-cell table:style-name="ce307" table:number-columns-repeated="12"/>
          <table:table-cell table:number-columns-repeated="16365"/>
        </table:table-row>
        <table:table-row table:style-name="ro4">
          <table:table-cell table:style-name="ce307"/>
          <table:table-cell table:style-name="ce309" office:value-type="string" calcext:value-type="string" table:number-columns-spanned="6" table:number-rows-spanned="1">
            <text:p>GASTOS OPERATIVOS PRIMER MES</text:p>
          </table:table-cell>
          <table:covered-table-cell table:number-columns-repeated="5" table:style-name="ce320"/>
          <table:table-cell table:style-name="ce307" table:number-columns-repeated="12"/>
          <table:table-cell table:number-columns-repeated="16365"/>
        </table:table-row>
        <table:table-row table:style-name="ro10">
          <table:table-cell table:style-name="ce307" table:number-columns-repeated="19"/>
          <table:table-cell table:number-columns-repeated="16365"/>
        </table:table-row>
        <table:table-row table:style-name="ro9">
          <table:table-cell table:style-name="ce307"/>
          <table:table-cell table:style-name="ce266" office:value-type="string" calcext:value-type="string" table:number-columns-spanned="1" table:number-rows-spanned="2">
            <text:p>RUBRO</text:p>
          </table:table-cell>
          <table:table-cell table:style-name="ce275" office:value-type="string" calcext:value-type="string" table:number-columns-spanned="1" table:number-rows-spanned="2">
            <text:p>COSTO UNITARIO</text:p>
          </table:table-cell>
          <table:table-cell table:style-name="ce275" office:value-type="string" calcext:value-type="string" table:number-columns-spanned="1" table:number-rows-spanned="2">
            <text:p>UNIDADES REQUERIDAS</text:p>
          </table:table-cell>
          <table:table-cell table:style-name="ce330" office:value-type="string" calcext:value-type="string" table:number-columns-spanned="2" table:number-rows-spanned="1">
            <text:p>COSTO </text:p>
          </table:table-cell>
          <table:covered-table-cell table:style-name="ce321"/>
          <table:table-cell table:style-name="ce330" office:value-type="string" calcext:value-type="string" table:number-columns-spanned="1" table:number-rows-spanned="2">
            <text:p>TOTAL</text:p>
          </table:table-cell>
          <table:table-cell table:style-name="ce307" table:number-columns-repeated="12"/>
          <table:table-cell table:number-columns-repeated="16365"/>
        </table:table-row>
        <table:table-row table:style-name="ro10">
          <table:table-cell table:style-name="ce307"/>
          <table:covered-table-cell table:style-name="ce310"/>
          <table:covered-table-cell table:number-columns-repeated="2" table:style-name="ce321"/>
          <table:table-cell table:style-name="ce330" office:value-type="string" calcext:value-type="string">
            <text:p>FIJO</text:p>
          </table:table-cell>
          <table:table-cell table:style-name="ce330" office:value-type="string" calcext:value-type="string">
            <text:p>VARIABLE</text:p>
          </table:table-cell>
          <table:covered-table-cell table:style-name="ce321"/>
          <table:table-cell table:style-name="ce307" table:number-columns-repeated="12"/>
          <table:table-cell table:number-columns-repeated="16365"/>
        </table:table-row>
        <table:table-row table:style-name="ro10">
          <table:table-cell table:style-name="ce307"/>
          <table:table-cell table:style-name="ce311" office:value-type="string" calcext:value-type="string">
            <text:p>GASTOS DE ADMINISTRACION</text:p>
          </table:table-cell>
          <table:table-cell table:style-name="ce322" table:number-columns-repeated="5"/>
          <table:table-cell table:style-name="ce307" table:number-columns-repeated="12"/>
          <table:table-cell table:number-columns-repeated="16365"/>
        </table:table-row>
        <table:table-row table:style-name="ro9">
          <table:table-cell table:style-name="ce307"/>
          <table:table-cell table:style-name="ce312" office:value-type="string" calcext:value-type="string">
            <text:p>Sueldos del personal</text:p>
          </table:table-cell>
          <table:table-cell table:style-name="ce322" table:formula="of:=+([$Sueldos.L139]+[$Sueldos.R139])/12" office:value-type="float" office:value="1845.05208333333" calcext:value-type="float">
            <text:p>1,845.05</text:p>
          </table:table-cell>
          <table:table-cell table:style-name="ce322" office:value-type="float" office:value="1" calcext:value-type="float">
            <text:p>1.00</text:p>
          </table:table-cell>
          <table:table-cell table:style-name="ce322" table:formula="of:=+[.C8]*[.D8]" office:value-type="float" office:value="1845.05208333333" calcext:value-type="float">
            <text:p>1,845.05</text:p>
          </table:table-cell>
          <table:table-cell table:style-name="ce322"/>
          <table:table-cell table:style-name="ce322" table:formula="of:=+[.E8]+[.F8]" office:value-type="float" office:value="1845.05208333333" calcext:value-type="float">
            <text:p>1,845.05</text:p>
          </table:table-cell>
          <table:table-cell table:style-name="ce307" table:number-columns-repeated="12"/>
          <table:table-cell table:number-columns-repeated="16365"/>
        </table:table-row>
        <table:table-row table:style-name="ro9">
          <table:table-cell table:style-name="ce307"/>
          <table:table-cell table:style-name="ce312" office:value-type="string" calcext:value-type="string">
            <text:p>Servicios: Agua, luz, telefono e internet</text:p>
          </table:table-cell>
          <table:table-cell table:style-name="ce322" office:value-type="float" office:value="450" calcext:value-type="float">
            <text:p>450.00</text:p>
          </table:table-cell>
          <table:table-cell table:style-name="ce322" office:value-type="float" office:value="1" calcext:value-type="float">
            <text:p>1.00</text:p>
          </table:table-cell>
          <table:table-cell table:style-name="ce322" table:formula="of:=+[.C9]*[.D9]" office:value-type="float" office:value="450" calcext:value-type="float">
            <text:p>450.00</text:p>
          </table:table-cell>
          <table:table-cell table:style-name="ce322"/>
          <table:table-cell table:style-name="ce322" table:formula="of:=+[.E9]+[.F9]" office:value-type="float" office:value="450" calcext:value-type="float">
            <text:p>450.00</text:p>
          </table:table-cell>
          <table:table-cell table:style-name="ce307" table:number-columns-repeated="12"/>
          <table:table-cell table:number-columns-repeated="16365"/>
        </table:table-row>
        <table:table-row table:style-name="ro9">
          <table:table-cell table:style-name="ce307"/>
          <table:table-cell table:style-name="ce312" office:value-type="string" calcext:value-type="string">
            <text:p>Mantenimiento y reparaciones.</text:p>
          </table:table-cell>
          <table:table-cell table:style-name="ce322" office:value-type="float" office:value="850" calcext:value-type="float">
            <text:p>850.00</text:p>
          </table:table-cell>
          <table:table-cell table:style-name="ce322" office:value-type="float" office:value="1" calcext:value-type="float">
            <text:p>1.00</text:p>
          </table:table-cell>
          <table:table-cell table:style-name="ce322" table:formula="of:=+[.C10]*[.D10]" office:value-type="float" office:value="850" calcext:value-type="float">
            <text:p>850.00</text:p>
          </table:table-cell>
          <table:table-cell table:style-name="ce322"/>
          <table:table-cell table:style-name="ce322" table:formula="of:=+[.E10]+[.F10]" office:value-type="float" office:value="850" calcext:value-type="float">
            <text:p>850.00</text:p>
          </table:table-cell>
          <table:table-cell table:style-name="ce307" table:number-columns-repeated="12"/>
          <table:table-cell table:number-columns-repeated="16365"/>
        </table:table-row>
        <table:table-row table:style-name="ro9">
          <table:table-cell table:style-name="ce307"/>
          <table:table-cell table:style-name="ce312" office:value-type="string" calcext:value-type="string">
            <text:p>Calibración</text:p>
          </table:table-cell>
          <table:table-cell table:style-name="ce322" office:value-type="float" office:value="116.666666666667" calcext:value-type="float">
            <text:p>116.67</text:p>
          </table:table-cell>
          <table:table-cell table:style-name="ce322" office:value-type="float" office:value="1" calcext:value-type="float">
            <text:p>1.00</text:p>
          </table:table-cell>
          <table:table-cell table:style-name="ce322" table:formula="of:=+[.C11]*[.D11]" office:value-type="float" office:value="116.666666666667" calcext:value-type="float">
            <text:p>116.67</text:p>
          </table:table-cell>
          <table:table-cell table:style-name="ce322"/>
          <table:table-cell table:style-name="ce322" table:formula="of:=+[.E11]+[.F11]" office:value-type="float" office:value="116.666666666667" calcext:value-type="float">
            <text:p>116.67</text:p>
          </table:table-cell>
          <table:table-cell table:style-name="ce307" table:number-columns-repeated="12"/>
          <table:table-cell table:number-columns-repeated="16365"/>
        </table:table-row>
        <table:table-row table:style-name="ro9">
          <table:table-cell table:style-name="ce307"/>
          <table:table-cell table:style-name="ce312" office:value-type="string" calcext:value-type="string">
            <text:p>Monitoreo ambiental</text:p>
          </table:table-cell>
          <table:table-cell table:style-name="ce322" office:value-type="float" office:value="500" calcext:value-type="float">
            <text:p>500.00</text:p>
          </table:table-cell>
          <table:table-cell table:style-name="ce322" office:value-type="float" office:value="1" calcext:value-type="float">
            <text:p>1.00</text:p>
          </table:table-cell>
          <table:table-cell table:style-name="ce322" table:formula="of:=+[.C12]*[.D12]" office:value-type="float" office:value="500" calcext:value-type="float">
            <text:p>500.00</text:p>
          </table:table-cell>
          <table:table-cell table:style-name="ce322"/>
          <table:table-cell table:style-name="ce322" table:formula="of:=+[.E12]+[.F12]" office:value-type="float" office:value="500" calcext:value-type="float">
            <text:p>500.00</text:p>
          </table:table-cell>
          <table:table-cell table:style-name="ce307" table:number-columns-repeated="12"/>
          <table:table-cell table:number-columns-repeated="16365"/>
        </table:table-row>
        <table:table-row table:style-name="ro9">
          <table:table-cell table:style-name="ce307"/>
          <table:table-cell table:style-name="ce312" office:value-type="string" calcext:value-type="string">
            <text:p>DJ Osinergmin</text:p>
          </table:table-cell>
          <table:table-cell table:style-name="ce322" office:value-type="float" office:value="25" calcext:value-type="float">
            <text:p>25.00</text:p>
          </table:table-cell>
          <table:table-cell table:style-name="ce322" office:value-type="float" office:value="1" calcext:value-type="float">
            <text:p>1.00</text:p>
          </table:table-cell>
          <table:table-cell table:style-name="ce322" table:formula="of:=+[.C13]*[.D13]" office:value-type="float" office:value="25" calcext:value-type="float">
            <text:p>25.00</text:p>
          </table:table-cell>
          <table:table-cell table:style-name="ce322"/>
          <table:table-cell table:style-name="ce322" table:formula="of:=+[.E13]+[.F13]" office:value-type="float" office:value="25" calcext:value-type="float">
            <text:p>25.00</text:p>
          </table:table-cell>
          <table:table-cell table:style-name="ce307" table:number-columns-repeated="12"/>
          <table:table-cell table:number-columns-repeated="16365"/>
        </table:table-row>
        <table:table-row table:style-name="ro9">
          <table:table-cell table:style-name="ce307"/>
          <table:table-cell table:style-name="ce312" office:value-type="string" calcext:value-type="string">
            <text:p>Revisión eléctrica</text:p>
          </table:table-cell>
          <table:table-cell table:style-name="ce322" office:value-type="float" office:value="20.8333333333333" calcext:value-type="float">
            <text:p>20.83</text:p>
          </table:table-cell>
          <table:table-cell table:style-name="ce322" office:value-type="float" office:value="1" calcext:value-type="float">
            <text:p>1.00</text:p>
          </table:table-cell>
          <table:table-cell table:style-name="ce322" table:formula="of:=+[.C14]*[.D14]" office:value-type="float" office:value="20.8333333333333" calcext:value-type="float">
            <text:p>20.83</text:p>
          </table:table-cell>
          <table:table-cell table:style-name="ce322"/>
          <table:table-cell table:style-name="ce322" table:formula="of:=+[.E14]+[.F14]" office:value-type="float" office:value="20.8333333333333" calcext:value-type="float">
            <text:p>20.83</text:p>
          </table:table-cell>
          <table:table-cell table:style-name="ce307" table:number-columns-repeated="12"/>
          <table:table-cell table:number-columns-repeated="16365"/>
        </table:table-row>
        <table:table-row table:style-name="ro9">
          <table:table-cell table:style-name="ce307"/>
          <table:table-cell table:style-name="ce312" office:value-type="string" calcext:value-type="string">
            <text:p>Póliza</text:p>
          </table:table-cell>
          <table:table-cell table:style-name="ce322" office:value-type="float" office:value="104.166666666667" calcext:value-type="float">
            <text:p>104.17</text:p>
          </table:table-cell>
          <table:table-cell table:style-name="ce322" office:value-type="float" office:value="1" calcext:value-type="float">
            <text:p>1.00</text:p>
          </table:table-cell>
          <table:table-cell table:style-name="ce322" table:formula="of:=+[.C15]*[.D15]" office:value-type="float" office:value="104.166666666667" calcext:value-type="float">
            <text:p>104.17</text:p>
          </table:table-cell>
          <table:table-cell table:style-name="ce322"/>
          <table:table-cell table:style-name="ce322" table:formula="of:=+[.E15]+[.F15]" office:value-type="float" office:value="104.166666666667" calcext:value-type="float">
            <text:p>104.17</text:p>
          </table:table-cell>
          <table:table-cell table:style-name="ce307" table:number-columns-repeated="12"/>
          <table:table-cell table:number-columns-repeated="16365"/>
        </table:table-row>
        <table:table-row table:style-name="ro10">
          <table:table-cell table:style-name="ce307"/>
          <table:table-cell table:style-name="ce312" office:value-type="string" calcext:value-type="string">
            <text:p>Amortizacion de Intangibles</text:p>
          </table:table-cell>
          <table:table-cell table:style-name="ce322" office:value-type="float" office:value="139.661016949153" calcext:value-type="float">
            <text:p>139.66</text:p>
          </table:table-cell>
          <table:table-cell table:style-name="ce322" office:value-type="float" office:value="1" calcext:value-type="float">
            <text:p>1.00</text:p>
          </table:table-cell>
          <table:table-cell table:style-name="ce322" table:formula="of:=+[.C16]*[.D16]" office:value-type="float" office:value="139.661016949153" calcext:value-type="float">
            <text:p>139.66</text:p>
          </table:table-cell>
          <table:table-cell table:style-name="ce322"/>
          <table:table-cell table:style-name="ce322" table:formula="of:=+[.E16]+[.F16]" office:value-type="float" office:value="139.661016949153" calcext:value-type="float">
            <text:p>139.66</text:p>
          </table:table-cell>
          <table:table-cell table:style-name="ce307" table:number-columns-repeated="12"/>
          <table:table-cell table:number-columns-repeated="16365"/>
        </table:table-row>
        <table:table-row table:style-name="ro10">
          <table:table-cell table:style-name="ce307"/>
          <table:table-cell table:style-name="ce313" office:value-type="string" calcext:value-type="string">
            <text:p>TOTAL GASTOS DE ADMINISTRACION</text:p>
          </table:table-cell>
          <table:table-cell table:style-name="ce322" table:number-columns-repeated="2"/>
          <table:table-cell table:style-name="ce331" table:formula="of:=SUM([.E8:.E16])" office:value-type="float" office:value="4051.37976694915" calcext:value-type="float">
            <text:p>4,051.38</text:p>
          </table:table-cell>
          <table:table-cell table:style-name="ce331" table:formula="of:=SUM([.F8:.F16])" office:value-type="float" office:value="0" calcext:value-type="float">
            <text:p>0.00</text:p>
          </table:table-cell>
          <table:table-cell table:style-name="ce331" table:formula="of:=SUM([.G8:.G16])" office:value-type="float" office:value="4051.37976694915" calcext:value-type="float">
            <text:p>4,051.38</text:p>
          </table:table-cell>
          <table:table-cell table:style-name="ce307" table:number-columns-repeated="12"/>
          <table:table-cell table:number-columns-repeated="16365"/>
        </table:table-row>
        <table:table-row table:style-name="ro9">
          <table:table-cell table:style-name="ce307"/>
          <table:table-cell table:style-name="ce312" office:value-type="string" calcext:value-type="string">
            <text:p>GASTOS DE VENTAS</text:p>
          </table:table-cell>
          <table:table-cell table:style-name="ce322" table:number-columns-repeated="5"/>
          <table:table-cell table:style-name="ce307" table:number-columns-repeated="12"/>
          <table:table-cell table:number-columns-repeated="16365"/>
        </table:table-row>
        <table:table-row table:style-name="ro9">
          <table:table-cell table:style-name="ce307"/>
          <table:table-cell table:style-name="ce314" office:value-type="string" calcext:value-type="string">
            <text:p>Sueldos del personal</text:p>
          </table:table-cell>
          <table:table-cell table:style-name="ce322" table:formula="of:=+(SUM([$Sueldos.L140:.L142])+SUM([$Sueldos.R140:.R142]))/12" office:value-type="float" office:value="3351.29375" calcext:value-type="float">
            <text:p>3,351.29</text:p>
          </table:table-cell>
          <table:table-cell table:style-name="ce322" office:value-type="float" office:value="1" calcext:value-type="float">
            <text:p>1.00</text:p>
          </table:table-cell>
          <table:table-cell table:style-name="ce322" table:formula="of:=+[.C19]*[.D19]" office:value-type="float" office:value="3351.29375" calcext:value-type="float">
            <text:p>3,351.29</text:p>
          </table:table-cell>
          <table:table-cell table:style-name="ce322"/>
          <table:table-cell table:style-name="ce322" table:formula="of:=+[.E19]+[.F19]" office:value-type="float" office:value="3351.29375" calcext:value-type="float">
            <text:p>3,351.29</text:p>
          </table:table-cell>
          <table:table-cell table:style-name="ce307" table:number-columns-repeated="12"/>
          <table:table-cell table:number-columns-repeated="16365"/>
        </table:table-row>
        <table:table-row table:style-name="ro9">
          <table:table-cell table:style-name="ce307"/>
          <table:table-cell table:style-name="ce314" office:value-type="string" calcext:value-type="string">
            <text:p>Comisión de ventas</text:p>
          </table:table-cell>
          <table:table-cell table:style-name="ce322" office:value-type="float" office:value="0" calcext:value-type="float">
            <text:p>0.00</text:p>
          </table:table-cell>
          <table:table-cell table:style-name="ce322" office:value-type="float" office:value="1" calcext:value-type="float">
            <text:p>1.00</text:p>
          </table:table-cell>
          <table:table-cell table:style-name="ce322" table:formula="of:=+[.C20]*[.D20]" office:value-type="float" office:value="0" calcext:value-type="float">
            <text:p>0.00</text:p>
          </table:table-cell>
          <table:table-cell table:style-name="ce322"/>
          <table:table-cell table:style-name="ce322" table:formula="of:=+[.E20]+[.F20]" office:value-type="float" office:value="0" calcext:value-type="float">
            <text:p>0.00</text:p>
          </table:table-cell>
          <table:table-cell table:style-name="ce307" table:number-columns-repeated="12"/>
          <table:table-cell table:number-columns-repeated="16365"/>
        </table:table-row>
        <table:table-row table:style-name="ro9">
          <table:table-cell table:style-name="ce307"/>
          <table:table-cell table:style-name="ce314" office:value-type="string" calcext:value-type="string">
            <text:p>Alquiler de local para venta</text:p>
          </table:table-cell>
          <table:table-cell table:style-name="ce322" office:value-type="float" office:value="0" calcext:value-type="float">
            <text:p>0.00</text:p>
          </table:table-cell>
          <table:table-cell table:style-name="ce322" office:value-type="float" office:value="1" calcext:value-type="float">
            <text:p>1.00</text:p>
          </table:table-cell>
          <table:table-cell table:style-name="ce322" table:formula="of:=+[.C21]*[.D21]" office:value-type="float" office:value="0" calcext:value-type="float">
            <text:p>0.00</text:p>
          </table:table-cell>
          <table:table-cell table:style-name="ce322"/>
          <table:table-cell table:style-name="ce322" table:formula="of:=+[.E21]+[.F21]" office:value-type="float" office:value="0" calcext:value-type="float">
            <text:p>0.00</text:p>
          </table:table-cell>
          <table:table-cell table:style-name="ce307" table:number-columns-repeated="12"/>
          <table:table-cell table:number-columns-repeated="16365"/>
        </table:table-row>
        <table:table-row table:style-name="ro9">
          <table:table-cell table:style-name="ce307"/>
          <table:table-cell table:style-name="ce314" office:value-type="string" calcext:value-type="string">
            <text:p>Costos de delivery</text:p>
          </table:table-cell>
          <table:table-cell table:style-name="ce322" office:value-type="float" office:value="0" calcext:value-type="float">
            <text:p>0.00</text:p>
          </table:table-cell>
          <table:table-cell table:style-name="ce322" office:value-type="float" office:value="1" calcext:value-type="float">
            <text:p>1.00</text:p>
          </table:table-cell>
          <table:table-cell table:style-name="ce322" table:formula="of:=+[.C22]*[.D22]" office:value-type="float" office:value="0" calcext:value-type="float">
            <text:p>0.00</text:p>
          </table:table-cell>
          <table:table-cell table:style-name="ce322"/>
          <table:table-cell table:style-name="ce322" table:formula="of:=+[.E22]+[.F22]" office:value-type="float" office:value="0" calcext:value-type="float">
            <text:p>0.00</text:p>
          </table:table-cell>
          <table:table-cell table:style-name="ce307" table:number-columns-repeated="12"/>
          <table:table-cell table:number-columns-repeated="16365"/>
        </table:table-row>
        <table:table-row table:style-name="ro10">
          <table:table-cell table:style-name="ce307"/>
          <table:table-cell table:style-name="ce314" office:value-type="string" calcext:value-type="string">
            <text:p>Promoción</text:p>
          </table:table-cell>
          <table:table-cell table:style-name="ce322" table:formula="of:=+[.F42]/12" office:value-type="float" office:value="282.222222222222" calcext:value-type="float">
            <text:p>282.22</text:p>
          </table:table-cell>
          <table:table-cell table:style-name="ce322" office:value-type="float" office:value="1" calcext:value-type="float">
            <text:p>1.00</text:p>
          </table:table-cell>
          <table:table-cell table:style-name="ce322" table:formula="of:=+[.C23]*[.D23]" office:value-type="float" office:value="282.222222222222" calcext:value-type="float">
            <text:p>282.22</text:p>
          </table:table-cell>
          <table:table-cell table:style-name="ce322"/>
          <table:table-cell table:style-name="ce322" table:formula="of:=+[.E23]+[.F23]" office:value-type="float" office:value="282.222222222222" calcext:value-type="float">
            <text:p>282.22</text:p>
          </table:table-cell>
          <table:table-cell table:style-name="ce307" table:number-columns-repeated="12"/>
          <table:table-cell table:number-columns-repeated="16365"/>
        </table:table-row>
        <table:table-row table:style-name="ro10">
          <table:table-cell table:style-name="ce307"/>
          <table:table-cell table:style-name="ce313" office:value-type="string" calcext:value-type="string">
            <text:p>TOTAL GASTOS DE VENTAS</text:p>
          </table:table-cell>
          <table:table-cell table:style-name="ce322" table:number-columns-repeated="2"/>
          <table:table-cell table:style-name="ce322" table:formula="of:=SUM([.E19:.E23])" office:value-type="float" office:value="3633.51597222222" calcext:value-type="float">
            <text:p>3,633.52</text:p>
          </table:table-cell>
          <table:table-cell table:style-name="ce322"/>
          <table:table-cell table:style-name="ce331" table:formula="of:=SUM([.G19:.G23])" office:value-type="float" office:value="3633.51597222222" calcext:value-type="float">
            <text:p>3,633.52</text:p>
          </table:table-cell>
          <table:table-cell table:style-name="ce307" table:number-columns-repeated="12"/>
          <table:table-cell table:number-columns-repeated="16365"/>
        </table:table-row>
        <table:table-row table:style-name="ro10">
          <table:table-cell table:style-name="ce307"/>
          <table:table-cell table:style-name="ce315" office:value-type="string" calcext:value-type="string">
            <text:p>TOTAL GASTOS OPERATIVOS</text:p>
          </table:table-cell>
          <table:table-cell table:style-name="ce323" table:number-columns-repeated="2"/>
          <table:table-cell table:style-name="ce323" table:formula="of:=+[.E17]+[.E24]" office:value-type="float" office:value="7684.89573917138" calcext:value-type="float">
            <text:p>7,684.90</text:p>
          </table:table-cell>
          <table:table-cell table:style-name="ce323"/>
          <table:table-cell table:style-name="ce323" table:formula="of:=+[.G24]+[.G17]" office:value-type="float" office:value="7684.89573917138" calcext:value-type="float">
            <text:p>7,684.90</text:p>
          </table:table-cell>
          <table:table-cell table:style-name="ce307" table:number-columns-repeated="12"/>
          <table:table-cell table:number-columns-repeated="16365"/>
        </table:table-row>
        <table:table-row table:style-name="ro9">
          <table:table-cell table:style-name="ce307"/>
          <table:table-cell table:style-name="ce316" office:value-type="string" calcext:value-type="string" table:number-columns-spanned="2" table:number-rows-spanned="1">
            <text:p>GASTOS OPERATIVOS (SUJETO A IGV)</text:p>
          </table:table-cell>
          <table:covered-table-cell table:style-name="ce320"/>
          <table:table-cell table:style-name="ce329"/>
          <table:table-cell table:style-name="ce329" table:formula="of:=([.E17]-[.E8])+([.E24]-[.E19])" office:value-type="float" office:value="2488.54990583804" calcext:value-type="float">
            <text:p>2,489</text:p>
          </table:table-cell>
          <table:table-cell table:style-name="ce329" office:value-type="string" calcext:value-type="string">
            <text:p>ANUAL</text:p>
          </table:table-cell>
          <table:table-cell table:style-name="ce340" table:formula="of:=[.E26]*12" office:value-type="float" office:value="29862.5988700565" calcext:value-type="float">
            <text:p>29863</text:p>
          </table:table-cell>
          <table:table-cell table:style-name="ce307" table:number-columns-repeated="12"/>
          <table:table-cell table:number-columns-repeated="16365"/>
        </table:table-row>
        <table:table-row table:style-name="ro4">
          <table:table-cell table:style-name="ce307"/>
          <table:table-cell table:style-name="ce309" office:value-type="string" calcext:value-type="string" table:number-columns-spanned="5" table:number-rows-spanned="1">
            <text:p>PRESUPUESTO ANUAL DE PROMOCION</text:p>
          </table:table-cell>
          <table:covered-table-cell table:number-columns-repeated="4" table:style-name="ce320"/>
          <table:table-cell table:style-name="ce307" table:number-columns-repeated="13"/>
          <table:table-cell table:number-columns-repeated="16365"/>
        </table:table-row>
        <table:table-row table:style-name="ro10">
          <table:table-cell table:style-name="ce307" table:number-columns-repeated="19"/>
          <table:table-cell table:number-columns-repeated="16365"/>
        </table:table-row>
        <table:table-row table:style-name="ro11">
          <table:table-cell table:style-name="ce307"/>
          <table:table-cell table:style-name="ce317" office:value-type="string" calcext:value-type="string" table:number-columns-spanned="1" table:number-rows-spanned="3">
            <text:p>RUBROS</text:p>
          </table:table-cell>
          <table:table-cell table:style-name="ce317" office:value-type="string" calcext:value-type="string" table:number-columns-spanned="1" table:number-rows-spanned="3">
            <text:p>Unidad Medida</text:p>
          </table:table-cell>
          <table:table-cell table:style-name="ce317" office:value-type="string" calcext:value-type="string" table:number-columns-spanned="1" table:number-rows-spanned="3">
            <text:p>Costo unitario</text:p>
          </table:table-cell>
          <table:table-cell table:style-name="ce332" office:value-type="string" calcext:value-type="string" table:number-columns-spanned="1" table:number-rows-spanned="3">
            <text:p>N° veces</text:p>
          </table:table-cell>
          <table:table-cell table:style-name="ce335" office:value-type="string" calcext:value-type="string" table:number-columns-spanned="1" table:number-rows-spanned="3">
            <text:p>COSTO</text:p>
            <text:p> ANUAL </text:p>
          </table:table-cell>
          <table:table-cell table:style-name="ce307" table:number-columns-repeated="13"/>
          <table:table-cell table:number-columns-repeated="16365"/>
        </table:table-row>
        <table:table-row table:style-name="ro11">
          <table:table-cell table:style-name="ce307"/>
          <table:covered-table-cell table:style-name="ce310"/>
          <table:covered-table-cell table:number-columns-repeated="4" table:style-name="ce324"/>
          <table:table-cell table:style-name="ce307" table:number-columns-repeated="13"/>
          <table:table-cell table:number-columns-repeated="16365"/>
        </table:table-row>
        <table:table-row table:style-name="ro11">
          <table:table-cell table:style-name="ce307"/>
          <table:covered-table-cell table:style-name="ce310"/>
          <table:covered-table-cell table:number-columns-repeated="4" table:style-name="ce324"/>
          <table:table-cell table:style-name="ce307" table:number-columns-repeated="13"/>
          <table:table-cell table:number-columns-repeated="16365"/>
        </table:table-row>
        <table:table-row table:style-name="ro14">
          <table:table-cell table:style-name="ce307"/>
          <table:table-cell table:style-name="ce318" office:value-type="string" calcext:value-type="string">
            <text:p>. Spots en radio</text:p>
          </table:table-cell>
          <table:table-cell table:style-name="ce325" office:value-type="string" calcext:value-type="string">
            <text:p>Anuncio</text:p>
          </table:table-cell>
          <table:table-cell table:style-name="ce326" office:value-type="float" office:value="120" calcext:value-type="float">
            <text:p>120</text:p>
          </table:table-cell>
          <table:table-cell table:style-name="ce333" office:value-type="float" office:value="12" calcext:value-type="float">
            <text:p>12</text:p>
          </table:table-cell>
          <table:table-cell table:style-name="ce336" table:formula="of:=+[.D32]*[.E32]" office:value-type="currency" office:currency="S/." office:value="1440" calcext:value-type="currency">
            <text:p>S/. 1,440.00</text:p>
          </table:table-cell>
          <table:table-cell table:style-name="ce307" table:number-columns-repeated="13"/>
          <table:table-cell table:number-columns-repeated="16365"/>
        </table:table-row>
        <table:table-row table:style-name="ro15">
          <table:table-cell table:style-name="ce307"/>
          <table:table-cell table:style-name="ce318" office:value-type="string" calcext:value-type="string">
            <text:p>. Spots en television</text:p>
          </table:table-cell>
          <table:table-cell table:style-name="ce325"/>
          <table:table-cell table:style-name="ce326"/>
          <table:table-cell table:style-name="ce333"/>
          <table:table-cell table:style-name="ce337"/>
          <table:table-cell table:style-name="ce307" table:number-columns-repeated="13"/>
          <table:table-cell table:number-columns-repeated="16365"/>
        </table:table-row>
        <table:table-row table:style-name="ro16">
          <table:table-cell table:style-name="ce307"/>
          <table:table-cell table:style-name="ce318" office:value-type="string" calcext:value-type="string">
            <text:p>• Gigantografias</text:p>
          </table:table-cell>
          <table:table-cell table:style-name="ce326" table:number-columns-repeated="3"/>
          <table:table-cell table:style-name="ce338"/>
          <table:table-cell table:style-name="ce307" table:number-columns-repeated="13"/>
          <table:table-cell table:number-columns-repeated="16365"/>
        </table:table-row>
        <table:table-row table:style-name="ro16">
          <table:table-cell table:style-name="ce307"/>
          <table:table-cell table:style-name="ce318" office:value-type="string" calcext:value-type="string">
            <text:p>• Mandiles</text:p>
          </table:table-cell>
          <table:table-cell table:style-name="ce326" table:number-columns-repeated="3"/>
          <table:table-cell table:style-name="ce338"/>
          <table:table-cell table:style-name="ce307" table:number-columns-repeated="13"/>
          <table:table-cell table:number-columns-repeated="16365"/>
        </table:table-row>
        <table:table-row table:style-name="ro16">
          <table:table-cell table:style-name="ce307"/>
          <table:table-cell table:style-name="ce318" office:value-type="string" calcext:value-type="string">
            <text:p>• Polos</text:p>
          </table:table-cell>
          <table:table-cell table:style-name="ce326" table:number-columns-repeated="3"/>
          <table:table-cell table:style-name="ce338"/>
          <table:table-cell table:style-name="ce307" table:number-columns-repeated="13"/>
          <table:table-cell table:number-columns-repeated="16365"/>
        </table:table-row>
        <table:table-row table:style-name="ro16">
          <table:table-cell table:style-name="ce307"/>
          <table:table-cell table:style-name="ce318" office:value-type="string" calcext:value-type="string">
            <text:p>• Bolsas</text:p>
          </table:table-cell>
          <table:table-cell table:style-name="ce326" table:number-columns-repeated="3"/>
          <table:table-cell table:style-name="ce338"/>
          <table:table-cell table:style-name="ce307" table:number-columns-repeated="13"/>
          <table:table-cell table:number-columns-repeated="16365"/>
        </table:table-row>
        <table:table-row table:style-name="ro16">
          <table:table-cell table:style-name="ce307"/>
          <table:table-cell table:style-name="ce318" office:value-type="string" calcext:value-type="string">
            <text:p>. Redes sociales</text:p>
          </table:table-cell>
          <table:table-cell table:style-name="ce326" office:value-type="string" calcext:value-type="string">
            <text:p>Anuncio</text:p>
          </table:table-cell>
          <table:table-cell table:style-name="ce326" office:value-type="float" office:value="80" calcext:value-type="float">
            <text:p>80</text:p>
          </table:table-cell>
          <table:table-cell table:style-name="ce334" table:formula="of:=365/15" office:value-type="float" office:value="24.3333333333333" calcext:value-type="float">
            <text:p>24</text:p>
          </table:table-cell>
          <table:table-cell table:style-name="ce338" table:formula="of:=+[.D38]*[.E38]" office:value-type="currency" office:currency="S/." office:value="1946.66666666667" calcext:value-type="currency">
            <text:p>S/. 1,946.67</text:p>
          </table:table-cell>
          <table:table-cell table:style-name="ce307" table:number-columns-repeated="13"/>
          <table:table-cell table:number-columns-repeated="16365"/>
        </table:table-row>
        <table:table-row table:style-name="ro16">
          <table:table-cell table:style-name="ce307"/>
          <table:table-cell table:style-name="ce319" office:value-type="string" calcext:value-type="string">
            <text:p>• Tarjetas personales</text:p>
          </table:table-cell>
          <table:table-cell table:style-name="ce326" table:number-columns-repeated="3"/>
          <table:table-cell table:style-name="ce338"/>
          <table:table-cell table:style-name="ce307" table:number-columns-repeated="13"/>
          <table:table-cell table:number-columns-repeated="16365"/>
        </table:table-row>
        <table:table-row table:style-name="ro16">
          <table:table-cell table:style-name="ce307"/>
          <table:table-cell table:style-name="ce319" office:value-type="string" calcext:value-type="string">
            <text:p>• mantenimiento de la pagina Web.</text:p>
          </table:table-cell>
          <table:table-cell table:style-name="ce326" table:number-columns-repeated="3"/>
          <table:table-cell table:style-name="ce338"/>
          <table:table-cell table:style-name="ce307" table:number-columns-repeated="13"/>
          <table:table-cell table:number-columns-repeated="16365"/>
        </table:table-row>
        <table:table-row table:style-name="ro16">
          <table:table-cell table:style-name="ce307"/>
          <table:table-cell table:style-name="ce318" office:value-type="string" calcext:value-type="string">
            <text:p>• tripticos</text:p>
          </table:table-cell>
          <table:table-cell table:style-name="ce326" table:number-columns-repeated="3"/>
          <table:table-cell table:style-name="ce338"/>
          <table:table-cell table:style-name="ce307" table:number-columns-repeated="13"/>
          <table:table-cell table:number-columns-repeated="16365"/>
        </table:table-row>
        <table:table-row table:style-name="ro10">
          <table:table-cell table:style-name="ce307"/>
          <table:table-cell table:style-name="ce317" office:value-type="string" calcext:value-type="string">
            <text:p>TOTAL</text:p>
          </table:table-cell>
          <table:table-cell table:style-name="ce327" table:number-columns-repeated="2"/>
          <table:table-cell table:style-name="ce317"/>
          <table:table-cell table:style-name="ce339" table:formula="of:=SUM([.F32:.F41])" office:value-type="currency" office:currency="S/." office:value="3386.66666666667" calcext:value-type="currency">
            <text:p>S/. 3,386.67</text:p>
          </table:table-cell>
          <table:table-cell table:style-name="ce307" table:number-columns-repeated="13"/>
          <table:table-cell table:number-columns-repeated="16365"/>
        </table:table-row>
        <table:table-row table:style-name="ro9">
          <table:table-cell table:style-name="ce307"/>
          <table:table-cell/>
          <table:table-cell table:style-name="ce328" table:number-columns-repeated="2"/>
          <table:table-cell table:style-name="ce307" table:number-columns-repeated="15"/>
          <table:table-cell table:number-columns-repeated="16365"/>
        </table:table-row>
        <table:table-row table:style-name="ro9" table:number-rows-repeated="961">
          <table:table-cell table:style-name="ce307" table:number-columns-repeated="19"/>
          <table:table-cell table:number-columns-repeated="16365"/>
        </table:table-row>
        <table:table-row table:style-name="ro4" table:number-rows-repeated="1047571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expression table:name="Precio_Materia_Prima" table:base-cell-address="$'Resumen del escenario 2'.$A$1" table:expression="#REF!"/>
          <table:named-expression table:name="Precio_Queso_Maduro" table:base-cell-address="$'Resumen del escenario 2'.$A$1" table:expression="#REF!"/>
          <table:named-expression table:name="Precio_retablo_unidad" table:base-cell-address="$'Resumen del escenario 2'.$A$1" table:expression="#REF!"/>
          <table:named-expression table:name="TIRE" table:base-cell-address="$'Resumen del escenario 2'.$A$1" table:expression="#REF!"/>
          <table:named-expression table:name="TIRF" table:base-cell-address="$'Resumen del escenario 2'.$A$1" table:expression="#REF!"/>
          <table:named-expression table:name="VANE" table:base-cell-address="$'Resumen del escenario 2'.$A$1" table:expression="#REF!"/>
          <table:named-expression table:name="VANF" table:base-cell-address="$'Resumen del escenario 2'.$A$1" table:expression="#REF!"/>
        </table:named-expressions>
      </table:table>
      <table:table table:name="Costos unitarios" table:style-name="ta12">
        <table:table-column table:style-name="co4" table:default-cell-style-name="ce16"/>
        <table:table-column table:style-name="co37" table:default-cell-style-name="ce16"/>
        <table:table-column table:style-name="co4" table:number-columns-repeated="2" table:default-cell-style-name="ce16"/>
        <table:table-column table:style-name="co38" table:default-cell-style-name="ce16"/>
        <table:table-column table:style-name="co4" table:number-columns-repeated="16379" table:default-cell-style-name="ce16"/>
        <table:table-row table:style-name="ro1">
          <table:table-cell table:number-columns-repeated="16384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COSTOS FIJOS PRIMER MES</text:p>
          </table:table-cell>
          <table:covered-table-cell table:style-name="ce33"/>
          <table:table-cell/>
          <table:table-cell table:style-name="ce20" office:value-type="string" calcext:value-type="string" table:number-columns-spanned="2" table:number-rows-spanned="1">
            <text:p>COSTOS UNITARIOS</text:p>
          </table:table-cell>
          <table:covered-table-cell table:style-name="ce3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41" office:value-type="string" calcext:value-type="string">
            <text:p>Costo fijo mes</text:p>
          </table:table-cell>
          <table:table-cell table:style-name="ce341" office:value-type="string" calcext:value-type="string">
            <text:p>soles</text:p>
          </table:table-cell>
          <table:table-cell/>
          <table:table-cell table:style-name="ce347" office:value-type="string" calcext:value-type="string">
            <text:p>Costos Unitarios</text:p>
          </table:table-cell>
          <table:table-cell table:style-name="ce347" office:value-type="string" calcext:value-type="string">
            <text:p>soles</text:p>
          </table:table-cell>
          <table:table-cell table:number-columns-repeated="16378"/>
        </table:table-row>
        <table:table-row table:style-name="ro1">
          <table:table-cell/>
          <table:table-cell table:style-name="ce23" office:value-type="string" calcext:value-type="string">
            <text:p>Gastos administrativos fijos</text:p>
          </table:table-cell>
          <table:table-cell table:style-name="ce59" table:formula="of:=+[$Gastos_Operativos.G17]-[$Gastos_Operativos.G16]" office:value-type="float" office:value="3911.71875" calcext:value-type="float">
            <text:p>3,911.72</text:p>
          </table:table-cell>
          <table:table-cell/>
          <table:table-cell table:style-name="ce23" office:value-type="string" calcext:value-type="string">
            <text:p>Nº de Unidades</text:p>
          </table:table-cell>
          <table:table-cell table:style-name="ce348" table:formula="of:=+[$'Presupuesto de ventas'.C58]" office:value-type="float" office:value="8158.49170437406" calcext:value-type="float">
            <text:p>8158</text:p>
          </table:table-cell>
          <table:table-cell table:number-columns-repeated="16378"/>
        </table:table-row>
        <table:table-row table:style-name="ro1">
          <table:table-cell/>
          <table:table-cell table:style-name="ce23" office:value-type="string" calcext:value-type="string">
            <text:p>Depreciación activo fijo</text:p>
          </table:table-cell>
          <table:table-cell table:style-name="ce23" table:formula="of:=+[$'Depreciación y VR'.F24]/12" office:value-type="float" office:value="2888.88122477805" calcext:value-type="float">
            <text:p>2888.88122477805</text:p>
          </table:table-cell>
          <table:table-cell/>
          <table:table-cell table:style-name="ce23" office:value-type="string" calcext:value-type="string">
            <text:p>Costo fijo unitario,CFU</text:p>
          </table:table-cell>
          <table:table-cell table:style-name="ce349" table:formula="of:=+[.C10]/[.F5]" office:value-type="float" office:value="1.29604556174035" calcext:value-type="float">
            <text:p>1.30</text:p>
          </table:table-cell>
          <table:table-cell table:number-columns-repeated="16378"/>
        </table:table-row>
        <table:table-row table:style-name="ro1">
          <table:table-cell/>
          <table:table-cell table:style-name="ce23" office:value-type="string" calcext:value-type="string">
            <text:p>Amortización de intangibles</text:p>
          </table:table-cell>
          <table:table-cell table:style-name="ce59" table:formula="of:=+[$Gastos_Operativos.G16]" office:value-type="float" office:value="139.661016949153" calcext:value-type="float">
            <text:p>139.66</text:p>
          </table:table-cell>
          <table:table-cell/>
          <table:table-cell table:style-name="ce23" office:value-type="string" calcext:value-type="string">
            <text:p>CVu DB5</text:p>
          </table:table-cell>
          <table:table-cell table:style-name="ce67" table:formula="of:=+[$Resumen.C10]" office:value-type="float" office:value="8.05889830508475" calcext:value-type="float">
            <text:p>8.06</text:p>
          </table:table-cell>
          <table:table-cell table:number-columns-repeated="16378"/>
        </table:table-row>
        <table:table-row table:style-name="ro1">
          <table:table-cell/>
          <table:table-cell table:style-name="ce23" office:value-type="string" calcext:value-type="string">
            <text:p>Gasto de ventas fijos</text:p>
          </table:table-cell>
          <table:table-cell table:style-name="ce59" table:formula="of:=+[$Gastos_Operativos.G24]" office:value-type="float" office:value="3633.51597222222" calcext:value-type="float">
            <text:p>3,633.52</text:p>
          </table:table-cell>
          <table:table-cell/>
          <table:table-cell table:style-name="ce23" office:value-type="string" calcext:value-type="string">
            <text:p>CVu G90</text:p>
          </table:table-cell>
          <table:table-cell table:style-name="ce67" table:formula="of:=+[$Resumen.C11]" office:value-type="float" office:value="8.19576271186441" calcext:value-type="float">
            <text:p>8.20</text:p>
          </table:table-cell>
          <table:table-cell table:number-columns-repeated="16378"/>
        </table:table-row>
        <table:table-row table:style-name="ro1">
          <table:table-cell/>
          <table:table-cell table:style-name="ce23" office:value-type="string" calcext:value-type="string">
            <text:p>CIF fijos</text:p>
          </table:table-cell>
          <table:table-cell table:style-name="ce23"/>
          <table:table-cell/>
          <table:table-cell table:style-name="ce23" office:value-type="string" calcext:value-type="string">
            <text:p>CVu G95</text:p>
          </table:table-cell>
          <table:table-cell table:style-name="ce67" table:formula="of:=+[$Resumen.C12]" office:value-type="float" office:value="8.45338983050847" calcext:value-type="float">
            <text:p>8.45</text:p>
          </table:table-cell>
          <table:table-cell table:number-columns-repeated="16378"/>
        </table:table-row>
        <table:table-row table:style-name="ro1">
          <table:table-cell/>
          <table:table-cell table:style-name="ce342" office:value-type="string" calcext:value-type="string">
            <text:p>Total Costo Fijo</text:p>
          </table:table-cell>
          <table:table-cell table:style-name="ce345" table:formula="of:=SUM([.C5:.C9])" office:value-type="float" office:value="10573.7769639494" calcext:value-type="float">
            <text:p>10,573.78</text:p>
          </table:table-cell>
          <table:table-cell/>
          <table:table-cell table:style-name="ce344" office:value-type="string" calcext:value-type="string">
            <text:p>CTu DB5</text:p>
          </table:table-cell>
          <table:table-cell table:style-name="ce350" table:formula="of:=+[.F7]+[.$F$6]" office:value-type="float" office:value="9.35494386682509" calcext:value-type="float">
            <text:p>9.35</text:p>
          </table:table-cell>
          <table:table-cell table:style-name="ce182"/>
          <table:table-cell table:number-columns-repeated="16377"/>
        </table:table-row>
        <table:table-row table:style-name="ro1">
          <table:table-cell/>
          <table:table-cell table:style-name="ce343"/>
          <table:table-cell table:style-name="ce346"/>
          <table:table-cell/>
          <table:table-cell table:style-name="ce344" office:value-type="string" calcext:value-type="string">
            <text:p>CTu G90</text:p>
          </table:table-cell>
          <table:table-cell table:style-name="ce350" table:formula="of:=+[.F8]+[.$F$6]" office:value-type="float" office:value="9.49180827360475" calcext:value-type="float">
            <text:p>9.49</text:p>
          </table:table-cell>
          <table:table-cell table:style-name="ce182"/>
          <table:table-cell table:number-columns-repeated="16377"/>
        </table:table-row>
        <table:table-row table:style-name="ro1">
          <table:table-cell/>
          <table:table-cell table:style-name="ce24" office:value-type="string" calcext:value-type="string" table:number-columns-spanned="2" table:number-rows-spanned="1">
            <text:p>COSTOS VARIABLES PRIMER MES</text:p>
          </table:table-cell>
          <table:covered-table-cell table:style-name="ce24"/>
          <table:table-cell/>
          <table:table-cell table:style-name="ce344" office:value-type="string" calcext:value-type="string">
            <text:p>CTu G95</text:p>
          </table:table-cell>
          <table:table-cell table:style-name="ce350" table:formula="of:=+[.F9]+[.$F$6]" office:value-type="float" office:value="9.74943539224882" calcext:value-type="float">
            <text:p>9.75</text:p>
          </table:table-cell>
          <table:table-cell table:style-name="ce182"/>
          <table:table-cell table:number-columns-repeated="16377"/>
        </table:table-row>
        <table:table-row table:style-name="ro1">
          <table:table-cell/>
          <table:table-cell table:style-name="ce344" office:value-type="string" calcext:value-type="string">
            <text:p>Costo variable mes</text:p>
          </table:table-cell>
          <table:table-cell table:style-name="ce347" office:value-type="string" calcext:value-type="string">
            <text:p>soles</text:p>
          </table:table-cell>
          <table:table-cell table:number-columns-repeated="16381"/>
        </table:table-row>
        <table:table-row table:style-name="ro1">
          <table:table-cell/>
          <table:table-cell table:style-name="ce23" office:value-type="string" calcext:value-type="string">
            <text:p>valor de compra DB5</text:p>
          </table:table-cell>
          <table:table-cell table:style-name="ce23" table:formula="of:=+[$Resumen.C10]*[$'Presupuesto de ventas'.C13]" office:value-type="float" office:value="34007.8215353938" calcext:value-type="float">
            <text:p>34007.8215353938</text:p>
          </table:table-cell>
          <table:table-cell table:number-columns-repeated="16381"/>
        </table:table-row>
        <table:table-row table:style-name="ro1">
          <table:table-cell/>
          <table:table-cell table:style-name="ce23" office:value-type="string" calcext:value-type="string">
            <text:p>valor de compra G90</text:p>
          </table:table-cell>
          <table:table-cell table:style-name="ce23" table:formula="of:=+[$Resumen.C11]*[$'Presupuesto de ventas'.C28]" office:value-type="float" office:value="25939.0327095636" calcext:value-type="float">
            <text:p>25939.0327095636</text:p>
          </table:table-cell>
          <table:table-cell table:number-columns-repeated="16381"/>
        </table:table-row>
        <table:table-row table:style-name="ro1">
          <table:table-cell/>
          <table:table-cell table:style-name="ce23" office:value-type="string" calcext:value-type="string">
            <text:p>valor de compra G95</text:p>
          </table:table-cell>
          <table:table-cell table:style-name="ce23" table:formula="of:=+[$Resumen.C12]*[$'Presupuesto de ventas'.C43]" office:value-type="float" office:value="6539.96567988343" calcext:value-type="float">
            <text:p>6539.96567988343</text:p>
          </table:table-cell>
          <table:table-cell table:number-columns-repeated="16381"/>
        </table:table-row>
        <table:table-row table:style-name="ro1">
          <table:table-cell/>
          <table:table-cell table:style-name="ce23" office:value-type="string" calcext:value-type="string">
            <text:p>Gastos operativos variables</text:p>
          </table:table-cell>
          <table:table-cell table:style-name="ce23"/>
          <table:table-cell table:number-columns-repeated="16381"/>
        </table:table-row>
        <table:table-row table:style-name="ro1">
          <table:table-cell/>
          <table:table-cell table:style-name="ce342" office:value-type="string" calcext:value-type="string">
            <text:p>Total Costo Variable</text:p>
          </table:table-cell>
          <table:table-cell table:style-name="ce342" table:formula="of:=SUM([.C14:.C17])" office:value-type="float" office:value="66486.8199248409" calcext:value-type="float">
            <text:p>66486.8199248409</text:p>
          </table:table-cell>
          <table:table-cell table:number-columns-repeated="16381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stado de resultados" table:style-name="ta13">
        <table:table-column table:style-name="co12" table:default-cell-style-name="ce351"/>
        <table:table-column table:style-name="co39" table:default-cell-style-name="ce351"/>
        <table:table-column table:style-name="co40" table:default-cell-style-name="ce351"/>
        <table:table-column table:style-name="co41" table:number-columns-repeated="10" table:default-cell-style-name="ce351"/>
        <table:table-column table:style-name="co12" table:number-columns-repeated="18" table:default-cell-style-name="ce351"/>
        <table:table-column table:style-name="co29" table:number-columns-repeated="16353" table:default-cell-style-name="ce351"/>
        <table:table-row table:style-name="ro9">
          <table:table-cell table:number-columns-repeated="16384"/>
        </table:table-row>
        <table:table-row table:style-name="ro10">
          <table:table-cell table:number-columns-repeated="16384"/>
        </table:table-row>
        <table:table-row table:style-name="ro10">
          <table:table-cell table:number-columns-repeated="2"/>
          <table:table-cell table:style-name="ce352" office:value-type="string" calcext:value-type="string" table:number-columns-spanned="11" table:number-rows-spanned="1">
            <text:p>ESTADO DE RESULTADOS ECONÓMICO</text:p>
          </table:table-cell>
          <table:covered-table-cell table:number-columns-repeated="10" table:style-name="ce359"/>
          <table:table-cell table:number-columns-repeated="16371"/>
        </table:table-row>
        <table:table-row table:style-name="ro9">
          <table:table-cell table:number-columns-repeated="2"/>
          <table:table-cell table:style-name="ce353" table:number-columns-repeated="11"/>
          <table:table-cell table:number-columns-repeated="16371"/>
        </table:table-row>
        <table:table-row table:style-name="ro9">
          <table:table-cell table:number-columns-repeated="2"/>
          <table:table-cell table:style-name="ce352" office:value-type="string" calcext:value-type="string" table:number-columns-spanned="11" table:number-rows-spanned="1">
            <text:p>REGIMEN TRIBUTARIO MYPE TRIBUTARIO Y GENERAL</text:p>
          </table:table-cell>
          <table:covered-table-cell table:number-columns-repeated="10" table:style-name="ce359"/>
          <table:table-cell table:number-columns-repeated="16371"/>
        </table:table-row>
        <table:table-row table:style-name="ro10">
          <table:table-cell table:number-columns-repeated="2"/>
          <table:table-cell table:style-name="ce353" table:number-columns-repeated="11"/>
          <table:table-cell table:number-columns-repeated="16371"/>
        </table:table-row>
        <table:table-row table:style-name="ro10">
          <table:table-cell table:number-columns-repeated="2"/>
          <table:table-cell table:style-name="ce354" office:value-type="string" calcext:value-type="string">
            <text:p>RUBRO</text:p>
          </table:table-cell>
          <table:table-cell table:style-name="ce354" office:value-type="float" office:value="1" calcext:value-type="float">
            <text:p>1</text:p>
          </table:table-cell>
          <table:table-cell table:style-name="ce354" table:formula="of:=1+[.D7]" office:value-type="float" office:value="2" calcext:value-type="float">
            <text:p>2</text:p>
          </table:table-cell>
          <table:table-cell table:style-name="ce354" table:formula="of:=1+[.E7]" office:value-type="float" office:value="3" calcext:value-type="float">
            <text:p>3</text:p>
          </table:table-cell>
          <table:table-cell table:style-name="ce354" office:value-type="float" office:value="4" calcext:value-type="float">
            <text:p>4</text:p>
          </table:table-cell>
          <table:table-cell table:style-name="ce354" office:value-type="float" office:value="5" calcext:value-type="float">
            <text:p>5</text:p>
          </table:table-cell>
          <table:table-cell table:style-name="ce354" office:value-type="float" office:value="6" calcext:value-type="float">
            <text:p>6</text:p>
          </table:table-cell>
          <table:table-cell table:style-name="ce354" office:value-type="float" office:value="7" calcext:value-type="float">
            <text:p>7</text:p>
          </table:table-cell>
          <table:table-cell table:style-name="ce354" office:value-type="float" office:value="8" calcext:value-type="float">
            <text:p>8</text:p>
          </table:table-cell>
          <table:table-cell table:style-name="ce354" office:value-type="float" office:value="9" calcext:value-type="float">
            <text:p>9</text:p>
          </table:table-cell>
          <table:table-cell table:style-name="ce354" office:value-type="float" office:value="10" calcext:value-type="float">
            <text:p>10</text:p>
          </table:table-cell>
          <table:table-cell table:number-columns-repeated="16371"/>
        </table:table-row>
        <table:table-row table:style-name="ro9">
          <table:table-cell table:number-columns-repeated="2"/>
          <table:table-cell table:style-name="ce355" office:value-type="string" calcext:value-type="string">
            <text:p>Ventas netas</text:p>
          </table:table-cell>
          <table:table-cell table:style-name="ce360" table:formula="of:=+[$'Presupuesto de ventas'.L125]" office:value-type="float" office:value="1298601.08474576" calcext:value-type="float">
            <text:p>1,298,601</text:p>
          </table:table-cell>
          <table:table-cell table:style-name="ce360" table:formula="of:=+[$'Presupuesto de ventas'.M125]" office:value-type="float" office:value="1443558.18644068" calcext:value-type="float">
            <text:p>1,443,558</text:p>
          </table:table-cell>
          <table:table-cell table:style-name="ce360" table:formula="of:=+[$'Presupuesto de ventas'.N125]" office:value-type="float" office:value="1544610.36949153" calcext:value-type="float">
            <text:p>1,544,610</text:p>
          </table:table-cell>
          <table:table-cell table:style-name="ce360" table:formula="of:=+[$'Presupuesto de ventas'.O125]" office:value-type="float" office:value="1652740.48535593" calcext:value-type="float">
            <text:p>1,652,740</text:p>
          </table:table-cell>
          <table:table-cell table:style-name="ce360" table:formula="of:=+[$'Presupuesto de ventas'.P125]" office:value-type="float" office:value="1768439.78933085" calcext:value-type="float">
            <text:p>1,768,440</text:p>
          </table:table-cell>
          <table:table-cell table:style-name="ce360" table:formula="of:=+[$'Presupuesto de ventas'.Q125]" office:value-type="float" office:value="1892233.92458401" calcext:value-type="float">
            <text:p>1,892,234</text:p>
          </table:table-cell>
          <table:table-cell table:style-name="ce360" table:formula="of:=+[$'Presupuesto de ventas'.R125]" office:value-type="float" office:value="2024685.32930489" calcext:value-type="float">
            <text:p>2,024,685</text:p>
          </table:table-cell>
          <table:table-cell table:style-name="ce360" table:formula="of:=+[$'Presupuesto de ventas'.S125]" office:value-type="float" office:value="2166410.81235623" calcext:value-type="float">
            <text:p>2,166,411</text:p>
          </table:table-cell>
          <table:table-cell table:style-name="ce360" table:formula="of:=+[$'Presupuesto de ventas'.T125]" office:value-type="float" office:value="2318054.30922117" calcext:value-type="float">
            <text:p>2,318,054</text:p>
          </table:table-cell>
          <table:table-cell table:style-name="ce360" table:formula="of:=+[$'Presupuesto de ventas'.U125]" office:value-type="float" office:value="2480319.83086665" calcext:value-type="float">
            <text:p>2,480,320</text:p>
          </table:table-cell>
          <table:table-cell table:number-columns-repeated="16371"/>
        </table:table-row>
        <table:table-row table:style-name="ro9">
          <table:table-cell table:number-columns-repeated="2"/>
          <table:table-cell table:style-name="ce356" office:value-type="string" calcext:value-type="string">
            <text:p>(-) Costo de ventas</text:p>
          </table:table-cell>
          <table:table-cell table:style-name="ce360" table:formula="of:=+-[$'Costos Ventas'.C22]" office:value-type="float" office:value="-945330.508474576" calcext:value-type="float">
            <text:p>-945,331</text:p>
          </table:table-cell>
          <table:table-cell table:style-name="ce360" table:formula="of:=+-[$'Costos Ventas'.D22]" office:value-type="float" office:value="-1051448.72881356" calcext:value-type="float">
            <text:p>-1,051,449</text:p>
          </table:table-cell>
          <table:table-cell table:style-name="ce360" table:formula="of:=+-[$'Costos Ventas'.E22]" office:value-type="float" office:value="-1125050.13983051" calcext:value-type="float">
            <text:p>-1,125,050</text:p>
          </table:table-cell>
          <table:table-cell table:style-name="ce360" table:formula="of:=+-[$'Costos Ventas'.F22]" office:value-type="float" office:value="-1203803.64961864" calcext:value-type="float">
            <text:p>-1,203,804</text:p>
          </table:table-cell>
          <table:table-cell table:style-name="ce360" table:formula="of:=+-[$'Costos Ventas'.G22]" office:value-type="float" office:value="-1288069.90509195" calcext:value-type="float">
            <text:p>-1,288,070</text:p>
          </table:table-cell>
          <table:table-cell table:style-name="ce360" table:formula="of:=+-[$'Costos Ventas'.H22]" office:value-type="float" office:value="-1378234.79844839" calcext:value-type="float">
            <text:p>-1,378,235</text:p>
          </table:table-cell>
          <table:table-cell table:style-name="ce360" table:formula="of:=+-[$'Costos Ventas'.I22]" office:value-type="float" office:value="-1474711.23433977" calcext:value-type="float">
            <text:p>-1,474,711</text:p>
          </table:table-cell>
          <table:table-cell table:style-name="ce360" table:formula="of:=+-[$'Costos Ventas'.J22]" office:value-type="float" office:value="-1577941.02074356" calcext:value-type="float">
            <text:p>-1,577,941</text:p>
          </table:table-cell>
          <table:table-cell table:style-name="ce360" table:formula="of:=+-[$'Costos Ventas'.K22]" office:value-type="float" office:value="-1688396.89219561" calcext:value-type="float">
            <text:p>-1,688,397</text:p>
          </table:table-cell>
          <table:table-cell table:style-name="ce360" table:formula="of:=+-[$'Costos Ventas'.L22]" office:value-type="float" office:value="-1806584.6746493" calcext:value-type="float">
            <text:p>-1,806,585</text:p>
          </table:table-cell>
          <table:table-cell table:number-columns-repeated="16371"/>
        </table:table-row>
        <table:table-row table:style-name="ro9">
          <table:table-cell table:number-columns-repeated="2"/>
          <table:table-cell table:style-name="ce356" office:value-type="string" calcext:value-type="string">
            <text:p>Costos de produccion</text:p>
          </table:table-cell>
          <table:table-cell table:style-name="ce360" table:number-columns-repeated="10"/>
          <table:table-cell table:number-columns-repeated="16371"/>
        </table:table-row>
        <table:table-row table:style-name="ro9">
          <table:table-cell table:number-columns-repeated="2"/>
          <table:table-cell table:style-name="ce356" office:value-type="string" calcext:value-type="string">
            <text:p>Depreciacion Activo Fijo</text:p>
          </table:table-cell>
          <table:table-cell table:style-name="ce360" table:formula="of:=+-[$'Depreciación y VR'.$F$24]" office:value-type="float" office:value="-34666.5746973366" calcext:value-type="float">
            <text:p>-34,667</text:p>
          </table:table-cell>
          <table:table-cell table:style-name="ce360" table:formula="of:=+-[$'Depreciación y VR'.$F$24]" office:value-type="float" office:value="-34666.5746973366" calcext:value-type="float">
            <text:p>-34,667</text:p>
          </table:table-cell>
          <table:table-cell table:style-name="ce360" table:formula="of:=+-[$'Depreciación y VR'.$F$24]" office:value-type="float" office:value="-34666.5746973366" calcext:value-type="float">
            <text:p>-34,667</text:p>
          </table:table-cell>
          <table:table-cell table:style-name="ce360" table:formula="of:=+-[$'Depreciación y VR'.$F$24]" office:value-type="float" office:value="-34666.5746973366" calcext:value-type="float">
            <text:p>-34,667</text:p>
          </table:table-cell>
          <table:table-cell table:style-name="ce360" table:formula="of:=+-[$'Depreciación y VR'.$F$24]" office:value-type="float" office:value="-34666.5746973366" calcext:value-type="float">
            <text:p>-34,667</text:p>
          </table:table-cell>
          <table:table-cell table:style-name="ce360" table:formula="of:=+-[$'Depreciación y VR'.$F$24]" office:value-type="float" office:value="-34666.5746973366" calcext:value-type="float">
            <text:p>-34,667</text:p>
          </table:table-cell>
          <table:table-cell table:style-name="ce360" table:formula="of:=+-[$'Depreciación y VR'.$F$24]" office:value-type="float" office:value="-34666.5746973366" calcext:value-type="float">
            <text:p>-34,667</text:p>
          </table:table-cell>
          <table:table-cell table:style-name="ce360" table:formula="of:=+-[$'Depreciación y VR'.$F$24]" office:value-type="float" office:value="-34666.5746973366" calcext:value-type="float">
            <text:p>-34,667</text:p>
          </table:table-cell>
          <table:table-cell table:style-name="ce360" table:formula="of:=+-[$'Depreciación y VR'.$F$24]" office:value-type="float" office:value="-34666.5746973366" calcext:value-type="float">
            <text:p>-34,667</text:p>
          </table:table-cell>
          <table:table-cell table:style-name="ce360" table:formula="of:=+-[$'Depreciación y VR'.$F$24]" office:value-type="float" office:value="-34666.5746973366" calcext:value-type="float">
            <text:p>-34,667</text:p>
          </table:table-cell>
          <table:table-cell table:number-columns-repeated="16371"/>
        </table:table-row>
        <table:table-row table:style-name="ro9">
          <table:table-cell table:number-columns-repeated="2"/>
          <table:table-cell table:style-name="ce357" office:value-type="string" calcext:value-type="string">
            <text:p>Utilidad Bruta</text:p>
          </table:table-cell>
          <table:table-cell table:style-name="ce361" table:formula="of:=SUM([.D8:.D11])" office:value-type="float" office:value="318604.00157385" calcext:value-type="float">
            <text:p>318,604</text:p>
          </table:table-cell>
          <table:table-cell table:style-name="ce361" table:formula="of:=SUM([.E8:.E11])" office:value-type="float" office:value="357442.882929782" calcext:value-type="float">
            <text:p>357,443</text:p>
          </table:table-cell>
          <table:table-cell table:style-name="ce361" table:formula="of:=SUM([.F8:.F11])" office:value-type="float" office:value="384893.65496368" calcext:value-type="float">
            <text:p>384,894</text:p>
          </table:table-cell>
          <table:table-cell table:style-name="ce361" table:formula="of:=SUM([.G8:.G11])" office:value-type="float" office:value="414270.261039951" calcext:value-type="float">
            <text:p>414,270</text:p>
          </table:table-cell>
          <table:table-cell table:style-name="ce361" table:formula="of:=SUM([.H8:.H11])" office:value-type="float" office:value="445703.309541562" calcext:value-type="float">
            <text:p>445,703</text:p>
          </table:table-cell>
          <table:table-cell table:style-name="ce361" table:formula="of:=SUM([.I8:.I11])" office:value-type="float" office:value="479332.551438285" calcext:value-type="float">
            <text:p>479,333</text:p>
          </table:table-cell>
          <table:table-cell table:style-name="ce361" table:formula="of:=SUM([.J8:.J11])" office:value-type="float" office:value="515307.520267778" calcext:value-type="float">
            <text:p>515,308</text:p>
          </table:table-cell>
          <table:table-cell table:style-name="ce361" table:formula="of:=SUM([.K8:.K11])" office:value-type="float" office:value="553803.216915336" calcext:value-type="float">
            <text:p>553,803</text:p>
          </table:table-cell>
          <table:table-cell table:style-name="ce361" table:formula="of:=SUM([.L8:.L11])" office:value-type="float" office:value="594990.842328224" calcext:value-type="float">
            <text:p>594,991</text:p>
          </table:table-cell>
          <table:table-cell table:style-name="ce361" table:formula="of:=SUM([.M8:.M11])" office:value-type="float" office:value="639068.581520013" calcext:value-type="float">
            <text:p>639,069</text:p>
          </table:table-cell>
          <table:table-cell table:number-columns-repeated="16371"/>
        </table:table-row>
        <table:table-row table:style-name="ro9">
          <table:table-cell table:number-columns-repeated="2"/>
          <table:table-cell table:style-name="ce356" office:value-type="string" calcext:value-type="string">
            <text:p>(-) Gastos operativos</text:p>
          </table:table-cell>
          <table:table-cell table:style-name="ce360" table:number-columns-repeated="10"/>
          <table:table-cell table:number-columns-repeated="16371"/>
        </table:table-row>
        <table:table-row table:style-name="ro9">
          <table:table-cell table:number-columns-repeated="2"/>
          <table:table-cell table:style-name="ce356" office:value-type="string" calcext:value-type="string">
            <text:p>Gastos administrativos</text:p>
          </table:table-cell>
          <table:table-cell table:style-name="ce360" table:formula="of:=+-[$Gastos_Operativos.$G$17]*12-[$Gastos_Operativos.$G$16]" office:value-type="float" office:value="-48756.218220339" calcext:value-type="float">
            <text:p>-48,756</text:p>
          </table:table-cell>
          <table:table-cell table:style-name="ce360" table:formula="of:=+-[$Gastos_Operativos.$G$17]*12-[$Gastos_Operativos.$G$16]" office:value-type="float" office:value="-48756.218220339" calcext:value-type="float">
            <text:p>-48,756</text:p>
          </table:table-cell>
          <table:table-cell table:style-name="ce360" table:formula="of:=+-[$Gastos_Operativos.$G$17]*12-[$Gastos_Operativos.$G$16]" office:value-type="float" office:value="-48756.218220339" calcext:value-type="float">
            <text:p>-48,756</text:p>
          </table:table-cell>
          <table:table-cell table:style-name="ce360" table:formula="of:=+-[$Gastos_Operativos.$G$17]*12-[$Gastos_Operativos.$G$16]" office:value-type="float" office:value="-48756.218220339" calcext:value-type="float">
            <text:p>-48,756</text:p>
          </table:table-cell>
          <table:table-cell table:style-name="ce360" table:formula="of:=+-[$Gastos_Operativos.$G$17]*12-[$Gastos_Operativos.$G$16]" office:value-type="float" office:value="-48756.218220339" calcext:value-type="float">
            <text:p>-48,756</text:p>
          </table:table-cell>
          <table:table-cell table:style-name="ce360" table:formula="of:=+-[$Gastos_Operativos.$G$17]*12-[$Gastos_Operativos.$G$16]" office:value-type="float" office:value="-48756.218220339" calcext:value-type="float">
            <text:p>-48,756</text:p>
          </table:table-cell>
          <table:table-cell table:style-name="ce360" table:formula="of:=+-[$Gastos_Operativos.$G$17]*12-[$Gastos_Operativos.$G$16]" office:value-type="float" office:value="-48756.218220339" calcext:value-type="float">
            <text:p>-48,756</text:p>
          </table:table-cell>
          <table:table-cell table:style-name="ce360" table:formula="of:=+-[$Gastos_Operativos.$G$17]*12-[$Gastos_Operativos.$G$16]" office:value-type="float" office:value="-48756.218220339" calcext:value-type="float">
            <text:p>-48,756</text:p>
          </table:table-cell>
          <table:table-cell table:style-name="ce360" table:formula="of:=+-[$Gastos_Operativos.$G$17]*12-[$Gastos_Operativos.$G$16]" office:value-type="float" office:value="-48756.218220339" calcext:value-type="float">
            <text:p>-48,756</text:p>
          </table:table-cell>
          <table:table-cell table:style-name="ce360" table:formula="of:=+-[$Gastos_Operativos.$G$17]*12-[$Gastos_Operativos.$G$16]" office:value-type="float" office:value="-48756.218220339" calcext:value-type="float">
            <text:p>-48,756</text:p>
          </table:table-cell>
          <table:table-cell table:number-columns-repeated="16371"/>
        </table:table-row>
        <table:table-row table:style-name="ro9">
          <table:table-cell table:number-columns-repeated="2"/>
          <table:table-cell table:style-name="ce356" office:value-type="string" calcext:value-type="string">
            <text:p>Gastos de ventas</text:p>
          </table:table-cell>
          <table:table-cell table:style-name="ce360" table:formula="of:=+-[$Gastos_Operativos.$G$24]*12" office:value-type="float" office:value="-43602.1916666667" calcext:value-type="float">
            <text:p>-43,602</text:p>
          </table:table-cell>
          <table:table-cell table:style-name="ce360" table:formula="of:=+-[$Gastos_Operativos.$G$24]*12" office:value-type="float" office:value="-43602.1916666667" calcext:value-type="float">
            <text:p>-43,602</text:p>
          </table:table-cell>
          <table:table-cell table:style-name="ce360" table:formula="of:=+-[$Gastos_Operativos.$G$24]*12" office:value-type="float" office:value="-43602.1916666667" calcext:value-type="float">
            <text:p>-43,602</text:p>
          </table:table-cell>
          <table:table-cell table:style-name="ce360" table:formula="of:=+-[$Gastos_Operativos.$G$24]*12" office:value-type="float" office:value="-43602.1916666667" calcext:value-type="float">
            <text:p>-43,602</text:p>
          </table:table-cell>
          <table:table-cell table:style-name="ce360" table:formula="of:=+-[$Gastos_Operativos.$G$24]*12" office:value-type="float" office:value="-43602.1916666667" calcext:value-type="float">
            <text:p>-43,602</text:p>
          </table:table-cell>
          <table:table-cell table:style-name="ce360" table:formula="of:=+-[$Gastos_Operativos.$G$24]*12" office:value-type="float" office:value="-43602.1916666667" calcext:value-type="float">
            <text:p>-43,602</text:p>
          </table:table-cell>
          <table:table-cell table:style-name="ce360" table:formula="of:=+-[$Gastos_Operativos.$G$24]*12" office:value-type="float" office:value="-43602.1916666667" calcext:value-type="float">
            <text:p>-43,602</text:p>
          </table:table-cell>
          <table:table-cell table:style-name="ce360" table:formula="of:=+-[$Gastos_Operativos.$G$24]*12" office:value-type="float" office:value="-43602.1916666667" calcext:value-type="float">
            <text:p>-43,602</text:p>
          </table:table-cell>
          <table:table-cell table:style-name="ce360" table:formula="of:=+-[$Gastos_Operativos.$G$24]*12" office:value-type="float" office:value="-43602.1916666667" calcext:value-type="float">
            <text:p>-43,602</text:p>
          </table:table-cell>
          <table:table-cell table:style-name="ce360" table:formula="of:=+-[$Gastos_Operativos.$G$24]*12" office:value-type="float" office:value="-43602.1916666667" calcext:value-type="float">
            <text:p>-43,602</text:p>
          </table:table-cell>
          <table:table-cell table:number-columns-repeated="16371"/>
        </table:table-row>
        <table:table-row table:style-name="ro9">
          <table:table-cell table:number-columns-repeated="2"/>
          <table:table-cell table:style-name="ce356" office:value-type="string" calcext:value-type="string">
            <text:p>Amortizacion de intangibles</text:p>
          </table:table-cell>
          <table:table-cell table:style-name="ce360" table:formula="of:=+-[$Gastos_Operativos.$G$16]*12" office:value-type="float" office:value="-1675.93220338983" calcext:value-type="float">
            <text:p>-1,676</text:p>
          </table:table-cell>
          <table:table-cell table:style-name="ce360" table:formula="of:=+-[$Gastos_Operativos.$G$16]*12" office:value-type="float" office:value="-1675.93220338983" calcext:value-type="float">
            <text:p>-1,676</text:p>
          </table:table-cell>
          <table:table-cell table:style-name="ce360" table:formula="of:=+-[$Gastos_Operativos.$G$16]*12" office:value-type="float" office:value="-1675.93220338983" calcext:value-type="float">
            <text:p>-1,676</text:p>
          </table:table-cell>
          <table:table-cell table:style-name="ce360" table:formula="of:=+-[$Gastos_Operativos.$G$16]*12" office:value-type="float" office:value="-1675.93220338983" calcext:value-type="float">
            <text:p>-1,676</text:p>
          </table:table-cell>
          <table:table-cell table:style-name="ce360" table:formula="of:=+-[$Gastos_Operativos.$G$16]*12" office:value-type="float" office:value="-1675.93220338983" calcext:value-type="float">
            <text:p>-1,676</text:p>
          </table:table-cell>
          <table:table-cell table:style-name="ce360" table:formula="of:=+-[$Gastos_Operativos.$G$16]*12" office:value-type="float" office:value="-1675.93220338983" calcext:value-type="float">
            <text:p>-1,676</text:p>
          </table:table-cell>
          <table:table-cell table:style-name="ce360" table:formula="of:=+-[$Gastos_Operativos.$G$16]*12" office:value-type="float" office:value="-1675.93220338983" calcext:value-type="float">
            <text:p>-1,676</text:p>
          </table:table-cell>
          <table:table-cell table:style-name="ce360" table:formula="of:=+-[$Gastos_Operativos.$G$16]*12" office:value-type="float" office:value="-1675.93220338983" calcext:value-type="float">
            <text:p>-1,676</text:p>
          </table:table-cell>
          <table:table-cell table:style-name="ce360" table:formula="of:=+-[$Gastos_Operativos.$G$16]*12" office:value-type="float" office:value="-1675.93220338983" calcext:value-type="float">
            <text:p>-1,676</text:p>
          </table:table-cell>
          <table:table-cell table:style-name="ce360" table:formula="of:=+-[$Gastos_Operativos.$G$16]*12" office:value-type="float" office:value="-1675.93220338983" calcext:value-type="float">
            <text:p>-1,676</text:p>
          </table:table-cell>
          <table:table-cell table:number-columns-repeated="16371"/>
        </table:table-row>
        <table:table-row table:style-name="ro9">
          <table:table-cell table:number-columns-repeated="2"/>
          <table:table-cell table:style-name="ce357" office:value-type="string" calcext:value-type="string">
            <text:p>Utilidad Operativa</text:p>
          </table:table-cell>
          <table:table-cell table:style-name="ce361" table:formula="of:=SUM([.D12:.D16])" office:value-type="float" office:value="224569.659483455" calcext:value-type="float">
            <text:p>224,570</text:p>
          </table:table-cell>
          <table:table-cell table:style-name="ce361" table:formula="of:=SUM([.E12:.E16])" office:value-type="float" office:value="263408.540839387" calcext:value-type="float">
            <text:p>263,409</text:p>
          </table:table-cell>
          <table:table-cell table:style-name="ce361" table:formula="of:=SUM([.F12:.F16])" office:value-type="float" office:value="290859.312873285" calcext:value-type="float">
            <text:p>290,859</text:p>
          </table:table-cell>
          <table:table-cell table:style-name="ce361" table:formula="of:=SUM([.G12:.G16])" office:value-type="float" office:value="320235.918949556" calcext:value-type="float">
            <text:p>320,236</text:p>
          </table:table-cell>
          <table:table-cell table:style-name="ce361" table:formula="of:=SUM([.H12:.H16])" office:value-type="float" office:value="351668.967451166" calcext:value-type="float">
            <text:p>351,669</text:p>
          </table:table-cell>
          <table:table-cell table:style-name="ce361" table:formula="of:=SUM([.I12:.I16])" office:value-type="float" office:value="385298.209347889" calcext:value-type="float">
            <text:p>385,298</text:p>
          </table:table-cell>
          <table:table-cell table:style-name="ce361" table:formula="of:=SUM([.J12:.J16])" office:value-type="float" office:value="421273.178177383" calcext:value-type="float">
            <text:p>421,273</text:p>
          </table:table-cell>
          <table:table-cell table:style-name="ce361" table:formula="of:=SUM([.K12:.K16])" office:value-type="float" office:value="459768.874824941" calcext:value-type="float">
            <text:p>459,769</text:p>
          </table:table-cell>
          <table:table-cell table:style-name="ce361" table:formula="of:=SUM([.L12:.L16])" office:value-type="float" office:value="500956.500237828" calcext:value-type="float">
            <text:p>500,957</text:p>
          </table:table-cell>
          <table:table-cell table:style-name="ce361" table:formula="of:=SUM([.M12:.M16])" office:value-type="float" office:value="545034.239429617" calcext:value-type="float">
            <text:p>545,034</text:p>
          </table:table-cell>
          <table:table-cell table:number-columns-repeated="16371"/>
        </table:table-row>
        <table:table-row table:style-name="ro9">
          <table:table-cell table:number-columns-repeated="2"/>
          <table:table-cell table:style-name="ce356" office:value-type="string" calcext:value-type="string">
            <text:p>Intereses</text:p>
          </table:table-cell>
          <table:table-cell table:style-name="ce360" table:formula="of:=+-[$Financiamiento.D138]" office:value-type="float" office:value="-33282.1317326412" calcext:value-type="float">
            <text:p>-33,282</text:p>
          </table:table-cell>
          <table:table-cell table:style-name="ce360" table:formula="of:=+-[$Financiamiento.E138]" office:value-type="float" office:value="-31059.8284924483" calcext:value-type="float">
            <text:p>-31,060</text:p>
          </table:table-cell>
          <table:table-cell table:style-name="ce360" table:formula="of:=+-[$Financiamiento.F138]" office:value-type="float" office:value="-28610.1117136818" calcext:value-type="float">
            <text:p>-28,610</text:p>
          </table:table-cell>
          <table:table-cell table:style-name="ce360" table:formula="of:=+-[$Financiamiento.G138]" office:value-type="float" office:value="-25909.7096318986" calcext:value-type="float">
            <text:p>-25,910</text:p>
          </table:table-cell>
          <table:table-cell table:style-name="ce360" table:formula="of:=+-[$Financiamiento.H138]" office:value-type="float" office:value="-22932.9690280438" calcext:value-type="float">
            <text:p>-22,933</text:p>
          </table:table-cell>
          <table:table-cell table:style-name="ce360" table:formula="of:=+-[$Financiamiento.I138]" office:value-type="float" office:value="-19651.6115285758" calcext:value-type="float">
            <text:p>-19,652</text:p>
          </table:table-cell>
          <table:table-cell table:style-name="ce360" table:formula="of:=+-[$Financiamiento.J138]" office:value-type="float" office:value="-16034.4649672089" calcext:value-type="float">
            <text:p>-16,034</text:p>
          </table:table-cell>
          <table:table-cell table:style-name="ce360" table:formula="of:=+-[$Financiamiento.K138]" office:value-type="float" office:value="-12047.1672562677" calcext:value-type="float">
            <text:p>-12,047</text:p>
          </table:table-cell>
          <table:table-cell table:style-name="ce360" table:formula="of:=+-[$Financiamiento.L138]" office:value-type="float" office:value="-7651.83995449846" calcext:value-type="float">
            <text:p>-7,652</text:p>
          </table:table-cell>
          <table:table-cell table:style-name="ce360" table:formula="of:=+-[$Financiamiento.M138]" office:value-type="float" office:value="-2806.72843030321" calcext:value-type="float">
            <text:p>-2,807</text:p>
          </table:table-cell>
          <table:table-cell table:number-columns-repeated="16371"/>
        </table:table-row>
        <table:table-row table:style-name="ro9">
          <table:table-cell table:number-columns-repeated="2"/>
          <table:table-cell table:style-name="ce357" office:value-type="string" calcext:value-type="string">
            <text:p>Utilidad Imponible</text:p>
          </table:table-cell>
          <table:table-cell table:style-name="ce361" table:formula="of:=SUM([.D17:.D18])" office:value-type="float" office:value="191287.527750813" calcext:value-type="float">
            <text:p>191,288</text:p>
          </table:table-cell>
          <table:table-cell table:style-name="ce361" table:formula="of:=SUM([.E17:.E18])" office:value-type="float" office:value="232348.712346938" calcext:value-type="float">
            <text:p>232,349</text:p>
          </table:table-cell>
          <table:table-cell table:style-name="ce361" table:formula="of:=SUM([.F17:.F18])" office:value-type="float" office:value="262249.201159603" calcext:value-type="float">
            <text:p>262,249</text:p>
          </table:table-cell>
          <table:table-cell table:style-name="ce361" table:formula="of:=SUM([.G17:.G18])" office:value-type="float" office:value="294326.209317657" calcext:value-type="float">
            <text:p>294,326</text:p>
          </table:table-cell>
          <table:table-cell table:style-name="ce361" table:formula="of:=SUM([.H17:.H18])" office:value-type="float" office:value="328735.998423123" calcext:value-type="float">
            <text:p>328,736</text:p>
          </table:table-cell>
          <table:table-cell table:style-name="ce361" table:formula="of:=SUM([.I17:.I18])" office:value-type="float" office:value="365646.597819313" calcext:value-type="float">
            <text:p>365,647</text:p>
          </table:table-cell>
          <table:table-cell table:style-name="ce361" table:formula="of:=SUM([.J17:.J18])" office:value-type="float" office:value="405238.713210174" calcext:value-type="float">
            <text:p>405,239</text:p>
          </table:table-cell>
          <table:table-cell table:style-name="ce361" table:formula="of:=SUM([.K17:.K18])" office:value-type="float" office:value="447721.707568673" calcext:value-type="float">
            <text:p>447,722</text:p>
          </table:table-cell>
          <table:table-cell table:style-name="ce361" table:formula="of:=SUM([.L17:.L18])" office:value-type="float" office:value="493304.66028333" calcext:value-type="float">
            <text:p>493,305</text:p>
          </table:table-cell>
          <table:table-cell table:style-name="ce361" table:formula="of:=SUM([.M17:.M18])" office:value-type="float" office:value="542227.510999314" calcext:value-type="float">
            <text:p>542,228</text:p>
          </table:table-cell>
          <table:table-cell table:number-columns-repeated="16371"/>
        </table:table-row>
        <table:table-row table:style-name="ro10">
          <table:table-cell table:number-columns-repeated="2"/>
          <table:table-cell table:style-name="ce356" office:value-type="string" calcext:value-type="string">
            <text:p>Impuesto a la renta (*)</text:p>
          </table:table-cell>
          <table:table-cell table:style-name="ce360" table:formula="of:=-[.D19]*[$Resumen.$G$3]" office:value-type="float" office:value="-56429.82068649" calcext:value-type="float">
            <text:p>-56,430</text:p>
          </table:table-cell>
          <table:table-cell table:style-name="ce360" table:formula="of:=-[.E19]*[$Resumen.$G$3]" office:value-type="float" office:value="-68542.8701423468" calcext:value-type="float">
            <text:p>-68,543</text:p>
          </table:table-cell>
          <table:table-cell table:style-name="ce360" table:formula="of:=-[.F19]*[$Resumen.$G$3]" office:value-type="float" office:value="-77363.5143420829" calcext:value-type="float">
            <text:p>-77,364</text:p>
          </table:table-cell>
          <table:table-cell table:style-name="ce360" table:formula="of:=-[.G19]*[$Resumen.$G$3]" office:value-type="float" office:value="-86826.2317487089" calcext:value-type="float">
            <text:p>-86,826</text:p>
          </table:table-cell>
          <table:table-cell table:style-name="ce360" table:formula="of:=-[.H19]*[$Resumen.$G$3]" office:value-type="float" office:value="-96977.1195348211" calcext:value-type="float">
            <text:p>-96,977</text:p>
          </table:table-cell>
          <table:table-cell table:style-name="ce360" table:formula="of:=-[.I19]*[$Resumen.$G$3]" office:value-type="float" office:value="-107865.746356697" calcext:value-type="float">
            <text:p>-107,866</text:p>
          </table:table-cell>
          <table:table-cell table:style-name="ce360" table:formula="of:=-[.J19]*[$Resumen.$G$3]" office:value-type="float" office:value="-119545.420397001" calcext:value-type="float">
            <text:p>-119,545</text:p>
          </table:table-cell>
          <table:table-cell table:style-name="ce360" table:formula="of:=-[.K19]*[$Resumen.$G$3]" office:value-type="float" office:value="-132077.903732759" calcext:value-type="float">
            <text:p>-132,078</text:p>
          </table:table-cell>
          <table:table-cell table:style-name="ce360" table:formula="of:=-[.L19]*[$Resumen.$G$3]" office:value-type="float" office:value="-145524.874783582" calcext:value-type="float">
            <text:p>-145,525</text:p>
          </table:table-cell>
          <table:table-cell table:style-name="ce360" table:formula="of:=-[.M19]*[$Resumen.$G$3]" office:value-type="float" office:value="-159957.115744798" calcext:value-type="float">
            <text:p>-159,957</text:p>
          </table:table-cell>
          <table:table-cell table:number-columns-repeated="16371"/>
        </table:table-row>
        <table:table-row table:style-name="ro10">
          <table:table-cell table:number-columns-repeated="2"/>
          <table:table-cell table:style-name="ce358" office:value-type="string" calcext:value-type="string">
            <text:p>Utilidad Neta</text:p>
          </table:table-cell>
          <table:table-cell table:style-name="ce361" table:formula="of:=+[.D19]+[.D20]" office:value-type="float" office:value="134857.707064323" calcext:value-type="float">
            <text:p>134,858</text:p>
          </table:table-cell>
          <table:table-cell table:style-name="ce361" table:formula="of:=+[.E19]+[.E20]" office:value-type="float" office:value="163805.842204592" calcext:value-type="float">
            <text:p>163,806</text:p>
          </table:table-cell>
          <table:table-cell table:style-name="ce361" table:formula="of:=+[.F19]+[.F20]" office:value-type="float" office:value="184885.68681752" calcext:value-type="float">
            <text:p>184,886</text:p>
          </table:table-cell>
          <table:table-cell table:style-name="ce361" table:formula="of:=+[.G19]+[.G20]" office:value-type="float" office:value="207499.977568948" calcext:value-type="float">
            <text:p>207,500</text:p>
          </table:table-cell>
          <table:table-cell table:style-name="ce361" table:formula="of:=+[.H19]+[.H20]" office:value-type="float" office:value="231758.878888301" calcext:value-type="float">
            <text:p>231,759</text:p>
          </table:table-cell>
          <table:table-cell table:style-name="ce361" table:formula="of:=+[.I19]+[.I20]" office:value-type="float" office:value="257780.851462616" calcext:value-type="float">
            <text:p>257,781</text:p>
          </table:table-cell>
          <table:table-cell table:style-name="ce361" table:formula="of:=+[.J19]+[.J20]" office:value-type="float" office:value="285693.292813173" calcext:value-type="float">
            <text:p>285,693</text:p>
          </table:table-cell>
          <table:table-cell table:style-name="ce361" table:formula="of:=+[.K19]+[.K20]" office:value-type="float" office:value="315643.803835914" calcext:value-type="float">
            <text:p>315,644</text:p>
          </table:table-cell>
          <table:table-cell table:style-name="ce361" table:formula="of:=+[.L19]+[.L20]" office:value-type="float" office:value="347779.785499747" calcext:value-type="float">
            <text:p>347,780</text:p>
          </table:table-cell>
          <table:table-cell table:style-name="ce361" table:formula="of:=+[.M19]+[.M20]" office:value-type="float" office:value="382270.395254516" calcext:value-type="float">
            <text:p>382,270</text:p>
          </table:table-cell>
          <table:table-cell table:style-name="ce363"/>
          <table:table-cell table:number-columns-repeated="16370"/>
        </table:table-row>
        <table:table-row table:style-name="ro9">
          <table:table-cell table:number-columns-repeated="2"/>
          <table:table-cell table:style-name="ce353" table:number-columns-repeated="11"/>
          <table:table-cell table:number-columns-repeated="16371"/>
        </table:table-row>
        <table:table-row table:style-name="ro9">
          <table:table-cell table:number-columns-repeated="2"/>
          <table:table-cell table:style-name="ce353"/>
          <table:table-cell table:style-name="ce353" table:formula="of:=15*4400" office:value-type="float" office:value="66000" calcext:value-type="float">
            <text:p>66000</text:p>
          </table:table-cell>
          <table:table-cell table:style-name="ce353" table:number-columns-repeated="9"/>
          <table:table-cell table:number-columns-repeated="16371"/>
        </table:table-row>
        <table:table-row table:style-name="ro9">
          <table:table-cell table:number-columns-repeated="16384"/>
        </table:table-row>
        <table:table-row table:style-name="ro9">
          <table:table-cell table:number-columns-repeated="3"/>
          <table:table-cell table:style-name="ce362"/>
          <table:table-cell table:number-columns-repeated="16380"/>
        </table:table-row>
        <table:table-row table:style-name="ro9" table:number-rows-repeated="951">
          <table:table-cell table:number-columns-repeated="16384"/>
        </table:table-row>
        <table:table-row table:style-name="ro1" table:number-rows-repeated="104759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unto de equilibrio" table:style-name="ta14">
        <table:table-column table:style-name="co42" table:default-cell-style-name="ce351"/>
        <table:table-column table:style-name="co43" table:default-cell-style-name="ce351"/>
        <table:table-column table:style-name="co44" table:default-cell-style-name="ce351"/>
        <table:table-column table:style-name="co45" table:default-cell-style-name="ce351"/>
        <table:table-column table:style-name="co16" table:default-cell-style-name="ce351"/>
        <table:table-column table:style-name="co44" table:default-cell-style-name="ce351"/>
        <table:table-column table:style-name="co12" table:default-cell-style-name="ce351"/>
        <table:table-column table:style-name="co36" table:default-cell-style-name="ce351"/>
        <table:table-column table:style-name="co4" table:number-columns-repeated="3" table:default-cell-style-name="ce351"/>
        <table:table-column table:style-name="co12" table:number-columns-repeated="15" table:default-cell-style-name="ce351"/>
        <table:table-column table:style-name="co29" table:number-columns-repeated="16358" table:default-cell-style-name="ce351"/>
        <table:table-row table:style-name="ro9">
          <table:table-cell table:style-name="ce353"/>
          <table:table-cell table:number-columns-repeated="16383"/>
        </table:table-row>
        <table:table-row table:style-name="ro10">
          <table:table-cell table:style-name="ce353"/>
          <table:table-cell table:style-name="ce364"/>
          <table:table-cell table:number-columns-repeated="16382"/>
        </table:table-row>
        <table:table-row table:style-name="ro10">
          <table:table-cell table:style-name="ce353"/>
          <table:table-cell/>
          <table:table-cell table:style-name="ce353" table:number-columns-repeated="4"/>
          <table:table-cell table:number-columns-repeated="16378"/>
        </table:table-row>
        <table:table-row table:style-name="ro10">
          <table:table-cell table:style-name="ce353"/>
          <table:table-cell table:style-name="ce352" office:value-type="string" calcext:value-type="string" table:number-columns-spanned="5" table:number-rows-spanned="1">
            <text:p>PUNTO DE EQULIBRIO PARA VARIOS PRODUCTOS</text:p>
          </table:table-cell>
          <table:covered-table-cell table:number-columns-repeated="4" table:style-name="ce359"/>
          <table:table-cell/>
          <table:table-cell table:style-name="ce352" office:value-type="string" calcext:value-type="string" table:number-columns-spanned="5" table:number-rows-spanned="1">
            <text:p>MARGEN DE CONTRIBUCIÓN PROMEDIO PONDERADO</text:p>
          </table:table-cell>
          <table:covered-table-cell table:number-columns-repeated="4" table:style-name="ce352"/>
          <table:table-cell table:number-columns-repeated="16372"/>
        </table:table-row>
        <table:table-row table:style-name="ro10">
          <table:table-cell table:style-name="ce353"/>
          <table:table-cell table:number-columns-repeated="6"/>
          <table:table-cell table:style-name="ce353" table:number-columns-repeated="4"/>
          <table:table-cell table:number-columns-repeated="16373"/>
        </table:table-row>
        <table:table-row table:style-name="ro17">
          <table:table-cell table:style-name="ce353"/>
          <table:table-cell table:style-name="ce365" office:value-type="string" calcext:value-type="string">
            <text:p>Producto</text:p>
          </table:table-cell>
          <table:table-cell table:style-name="ce365" office:value-type="string" calcext:value-type="string">
            <text:p>Precio</text:p>
          </table:table-cell>
          <table:table-cell table:style-name="ce365" office:value-type="string" calcext:value-type="string">
            <text:p>Cvu</text:p>
          </table:table-cell>
          <table:table-cell table:style-name="ce365" office:value-type="string" calcext:value-type="string">
            <text:p>Mgcu</text:p>
          </table:table-cell>
          <table:table-cell table:style-name="ce372" office:value-type="string" calcext:value-type="string">
            <text:p>% del total</text:p>
            <text:p>ventas</text:p>
          </table:table-cell>
          <table:table-cell/>
          <table:table-cell table:style-name="ce365" office:value-type="string" calcext:value-type="string" table:number-columns-spanned="2" table:number-rows-spanned="1">
            <text:p>Productos</text:p>
          </table:table-cell>
          <table:covered-table-cell table:style-name="ce365"/>
          <table:table-cell table:style-name="ce365" office:value-type="string" calcext:value-type="string">
            <text:p>Mgcu</text:p>
          </table:table-cell>
          <table:table-cell table:style-name="ce365" office:value-type="string" calcext:value-type="string">
            <text:p>Peso</text:p>
          </table:table-cell>
          <table:table-cell table:style-name="ce372" office:value-type="string" calcext:value-type="string">
            <text:p>Mgcu</text:p>
            <text:p>ponderado</text:p>
          </table:table-cell>
          <table:table-cell table:formula="of:=+LOWER([.G6])">
            <text:p/>
          </table:table-cell>
          <table:table-cell table:number-columns-repeated="16371"/>
        </table:table-row>
        <table:table-row table:style-name="ro9">
          <table:table-cell table:style-name="ce353"/>
          <table:table-cell table:style-name="ce356" office:value-type="string" calcext:value-type="string">
            <text:p>Diesel B5</text:p>
          </table:table-cell>
          <table:table-cell table:style-name="ce367" table:formula="of:=+[$Resumen.D4]" office:value-type="float" office:value="12.99" calcext:value-type="float">
            <text:p>13.0</text:p>
          </table:table-cell>
          <table:table-cell table:style-name="ce375" table:formula="of:=+[$Resumen.D10]" office:value-type="float" office:value="9.5095" calcext:value-type="float">
            <text:p>9.51</text:p>
          </table:table-cell>
          <table:table-cell table:style-name="ce375" table:formula="of:=+[.C7]-[.D7]" office:value-type="float" office:value="3.4805" calcext:value-type="float">
            <text:p>3.48</text:p>
          </table:table-cell>
          <table:table-cell table:style-name="ce380" table:formula="of:=+[$'Presupuesto de ventas'.S73]/[$'Presupuesto de ventas'.$S$76]" office:value-type="percentage" office:value="0.512812725293158" calcext:value-type="percentage">
            <text:p>51.3%</text:p>
          </table:table-cell>
          <table:table-cell/>
          <table:table-cell table:style-name="ce355" office:value-type="string" calcext:value-type="string" table:number-columns-spanned="2" table:number-rows-spanned="1">
            <text:p>Diesel B5</text:p>
          </table:table-cell>
          <table:covered-table-cell table:style-name="ce355"/>
          <table:table-cell table:style-name="ce375" table:formula="of:=[.E7]" office:value-type="float" office:value="3.4805" calcext:value-type="float">
            <text:p>3.48</text:p>
          </table:table-cell>
          <table:table-cell table:style-name="ce380" table:formula="of:=[.F7]" office:value-type="percentage" office:value="0.512812725293158" calcext:value-type="percentage">
            <text:p>51.3%</text:p>
          </table:table-cell>
          <table:table-cell table:style-name="ce383" table:formula="of:=[.J7]*[.K7]" office:value-type="float" office:value="1.78484469038284" calcext:value-type="float">
            <text:p>1.7848</text:p>
          </table:table-cell>
          <table:table-cell table:number-columns-repeated="16372"/>
        </table:table-row>
        <table:table-row table:style-name="ro9">
          <table:table-cell table:style-name="ce353"/>
          <table:table-cell table:style-name="ce356" office:value-type="string" calcext:value-type="string">
            <text:p>Gasohol 90</text:p>
          </table:table-cell>
          <table:table-cell table:style-name="ce367" table:formula="of:=+[$Resumen.D5]" office:value-type="float" office:value="13.034" calcext:value-type="float">
            <text:p>13.0</text:p>
          </table:table-cell>
          <table:table-cell table:style-name="ce375" table:formula="of:=+[$Resumen.D11]" office:value-type="float" office:value="9.671" calcext:value-type="float">
            <text:p>9.67</text:p>
          </table:table-cell>
          <table:table-cell table:style-name="ce375" table:formula="of:=+[.C8]-[.D8]" office:value-type="float" office:value="3.363" calcext:value-type="float">
            <text:p>3.36</text:p>
          </table:table-cell>
          <table:table-cell table:style-name="ce380" table:formula="of:=+[$'Presupuesto de ventas'.S74]/[$'Presupuesto de ventas'.$S$76]" office:value-type="percentage" office:value="0.385912301470613" calcext:value-type="percentage">
            <text:p>38.6%</text:p>
          </table:table-cell>
          <table:table-cell/>
          <table:table-cell table:style-name="ce355" office:value-type="string" calcext:value-type="string" table:number-columns-spanned="2" table:number-rows-spanned="1">
            <text:p>Gasohol 90</text:p>
          </table:table-cell>
          <table:covered-table-cell table:style-name="ce355"/>
          <table:table-cell table:style-name="ce375" table:formula="of:=[.E8]" office:value-type="float" office:value="3.363" calcext:value-type="float">
            <text:p>3.36</text:p>
          </table:table-cell>
          <table:table-cell table:style-name="ce380" table:formula="of:=[.F8]" office:value-type="percentage" office:value="0.385912301470613" calcext:value-type="percentage">
            <text:p>38.6%</text:p>
          </table:table-cell>
          <table:table-cell table:style-name="ce383" table:formula="of:=[.J8]*[.K8]" office:value-type="float" office:value="1.29782306984567" calcext:value-type="float">
            <text:p>1.2978</text:p>
          </table:table-cell>
          <table:table-cell table:number-columns-repeated="16372"/>
        </table:table-row>
        <table:table-row table:style-name="ro10">
          <table:table-cell table:style-name="ce353"/>
          <table:table-cell table:style-name="ce356" office:value-type="string" calcext:value-type="string">
            <text:p>Gasohol 95</text:p>
          </table:table-cell>
          <table:table-cell table:style-name="ce367" table:formula="of:=+[$Resumen.D6]" office:value-type="float" office:value="13.9929" calcext:value-type="float">
            <text:p>14.0</text:p>
          </table:table-cell>
          <table:table-cell table:style-name="ce375" table:formula="of:=+[$Resumen.D12]" office:value-type="float" office:value="9.975" calcext:value-type="float">
            <text:p>9.98</text:p>
          </table:table-cell>
          <table:table-cell table:style-name="ce375" table:formula="of:=+[.C9]-[.D9]" office:value-type="float" office:value="4.0179" calcext:value-type="float">
            <text:p>4.02</text:p>
          </table:table-cell>
          <table:table-cell table:style-name="ce380" table:formula="of:=+[$'Presupuesto de ventas'.S75]/[$'Presupuesto de ventas'.$S$76]" office:value-type="percentage" office:value="0.101274196845395" calcext:value-type="percentage">
            <text:p>10.1%</text:p>
          </table:table-cell>
          <table:table-cell/>
          <table:table-cell table:style-name="ce355" office:value-type="string" calcext:value-type="string" table:number-columns-spanned="2" table:number-rows-spanned="1">
            <text:p>Gasohol 95</text:p>
          </table:table-cell>
          <table:covered-table-cell table:style-name="ce355"/>
          <table:table-cell table:style-name="ce375" table:formula="of:=[.E9]" office:value-type="float" office:value="4.0179" calcext:value-type="float">
            <text:p>4.02</text:p>
          </table:table-cell>
          <table:table-cell table:style-name="ce380" table:formula="of:=[.F9]" office:value-type="percentage" office:value="0.101274196845395" calcext:value-type="percentage">
            <text:p>10.1%</text:p>
          </table:table-cell>
          <table:table-cell table:style-name="ce383" table:formula="of:=[.J9]*[.K9]" office:value-type="float" office:value="0.406909595505113" calcext:value-type="float">
            <text:p>0.4069</text:p>
          </table:table-cell>
          <table:table-cell table:number-columns-repeated="16372"/>
        </table:table-row>
        <table:table-row table:style-name="ro10">
          <table:table-cell table:style-name="ce353"/>
          <table:table-cell table:style-name="ce358" office:value-type="string" calcext:value-type="string">
            <text:p>Total</text:p>
          </table:table-cell>
          <table:table-cell table:style-name="ce356"/>
          <table:table-cell table:style-name="ce375" table:number-columns-repeated="2"/>
          <table:table-cell table:style-name="ce381" table:formula="of:=SUM([.F7:.F9])" office:value-type="percentage" office:value="0.999999223609166" calcext:value-type="percentage">
            <text:p>100.0%</text:p>
          </table:table-cell>
          <table:table-cell/>
          <table:table-cell table:style-name="ce358" office:value-type="string" calcext:value-type="string" table:number-columns-spanned="3" table:number-rows-spanned="1">
            <text:p>MgCU PONDERADO</text:p>
          </table:table-cell>
          <table:covered-table-cell table:number-columns-repeated="2" table:style-name="ce374"/>
          <table:table-cell table:style-name="ce382"/>
          <table:table-cell table:style-name="ce384" table:formula="of:=SUM([.L7:.L9])" office:value-type="float" office:value="3.48957735573362" calcext:value-type="float">
            <text:p>3.4896</text:p>
          </table:table-cell>
          <table:table-cell table:number-columns-repeated="16372"/>
        </table:table-row>
        <table:table-row table:style-name="ro9">
          <table:table-cell table:style-name="ce353" table:number-columns-repeated="6"/>
          <table:table-cell table:number-columns-repeated="16378"/>
        </table:table-row>
        <table:table-row table:style-name="ro9">
          <table:table-cell table:style-name="ce353"/>
          <table:table-cell table:style-name="ce364" office:value-type="string" calcext:value-type="string">
            <text:p>PUNTO DE EQUILIBRIO TOTAL COMBINADO</text:p>
          </table:table-cell>
          <table:table-cell table:style-name="ce353" table:number-columns-repeated="4"/>
          <table:table-cell table:number-columns-repeated="16378"/>
        </table:table-row>
        <table:table-row table:style-name="ro10">
          <table:table-cell table:style-name="ce353" table:number-columns-repeated="4"/>
          <table:table-cell table:number-columns-repeated="16380"/>
        </table:table-row>
        <table:table-row table:style-name="ro4">
          <table:table-cell table:style-name="ce353"/>
          <table:table-cell table:style-name="ce366" office:value-type="string" calcext:value-type="string">
            <text:p><text:s text:c="3"/>PE =</text:p>
          </table:table-cell>
          <table:table-cell table:style-name="ce368" table:formula="of:=+[$'Costos unitarios'.C10]" office:value-type="float" office:value="10573.7769639494" calcext:value-type="float">
            <text:p>10573.78</text:p>
          </table:table-cell>
          <table:table-cell table:style-name="ce353"/>
          <table:table-cell table:number-columns-repeated="16380"/>
        </table:table-row>
        <table:table-row table:style-name="ro9">
          <table:table-cell table:style-name="ce353" table:number-columns-repeated="2"/>
          <table:table-cell table:style-name="ce369" table:formula="of:=+[.L10]" office:value-type="float" office:value="3.48957735573362" calcext:value-type="float">
            <text:p>3.4896</text:p>
          </table:table-cell>
          <table:table-cell table:style-name="ce353"/>
          <table:table-cell table:number-columns-repeated="16380"/>
        </table:table-row>
        <table:table-row table:style-name="ro9">
          <table:table-cell table:style-name="ce353" table:number-columns-repeated="4"/>
          <table:table-cell table:number-columns-repeated="16380"/>
        </table:table-row>
        <table:table-row table:style-name="ro10">
          <table:table-cell table:style-name="ce353"/>
          <table:table-cell table:style-name="ce366" office:value-type="string" calcext:value-type="string">
            <text:p>PE =</text:p>
          </table:table-cell>
          <table:table-cell table:style-name="ce370" table:formula="of:=+[.C14]/[.C15]" office:value-type="float" office:value="3030.10246973776" calcext:value-type="float">
            <text:p>3030</text:p>
          </table:table-cell>
          <table:table-cell table:style-name="ce353" office:value-type="string" calcext:value-type="string">
            <text:p>Unidades <text:s/>combinadas</text:p>
          </table:table-cell>
          <table:table-cell table:number-columns-repeated="16380"/>
        </table:table-row>
        <table:table-row table:style-name="ro10">
          <table:table-cell table:style-name="ce353"/>
          <table:table-cell table:number-columns-repeated="16383"/>
        </table:table-row>
        <table:table-row table:style-name="ro10">
          <table:table-cell table:style-name="ce353"/>
          <table:table-cell table:style-name="ce352" office:value-type="string" calcext:value-type="string" table:number-columns-spanned="5" table:number-rows-spanned="1">
            <text:p>PUNTO DE EQUILIBRIO EN UNIDADES POR PRODUCTO</text:p>
          </table:table-cell>
          <table:covered-table-cell table:number-columns-repeated="4" table:style-name="ce371"/>
          <table:table-cell/>
          <table:table-cell table:style-name="ce352" office:value-type="string" calcext:value-type="string" table:number-columns-spanned="5" table:number-rows-spanned="1">
            <text:p>PUNTO DE EQUILIBRIO EN SOLES <text:s/>POR PRODUCTO</text:p>
          </table:table-cell>
          <table:covered-table-cell table:number-columns-repeated="4" table:style-name="ce371"/>
          <table:table-cell table:number-columns-repeated="16372"/>
        </table:table-row>
        <table:table-row table:style-name="ro9">
          <table:table-cell table:style-name="ce353" table:number-columns-repeated="6"/>
          <table:table-cell/>
          <table:table-cell table:style-name="ce353" table:number-columns-repeated="5"/>
          <table:table-cell table:number-columns-repeated="16372"/>
        </table:table-row>
        <table:table-row table:style-name="ro9">
          <table:table-cell table:style-name="ce353"/>
          <table:table-cell table:style-name="ce365" office:value-type="string" calcext:value-type="string">
            <text:p>Productos</text:p>
          </table:table-cell>
          <table:table-cell table:style-name="ce372" office:value-type="string" calcext:value-type="string">
            <text:p>Unidad</text:p>
            <text:p>de medida</text:p>
          </table:table-cell>
          <table:table-cell table:style-name="ce372" office:value-type="string" calcext:value-type="string">
            <text:p>Cantidad anual</text:p>
          </table:table-cell>
          <table:table-cell table:style-name="ce372" office:value-type="string" calcext:value-type="string">
            <text:p>Cantidad mensual</text:p>
          </table:table-cell>
          <table:table-cell table:style-name="ce372" office:value-type="string" calcext:value-type="string">
            <text:p>Cantidad diaria</text:p>
          </table:table-cell>
          <table:table-cell/>
          <table:table-cell table:style-name="ce365" office:value-type="string" calcext:value-type="string">
            <text:p>Productos</text:p>
          </table:table-cell>
          <table:table-cell table:style-name="ce372" office:value-type="string" calcext:value-type="string">
            <text:p>Precio</text:p>
          </table:table-cell>
          <table:table-cell table:style-name="ce372" office:value-type="string" calcext:value-type="string">
            <text:p>Soles por año</text:p>
          </table:table-cell>
          <table:table-cell table:style-name="ce372" office:value-type="string" calcext:value-type="string">
            <text:p>Soles por mes</text:p>
          </table:table-cell>
          <table:table-cell table:style-name="ce372" office:value-type="string" calcext:value-type="string">
            <text:p>Soles por dia</text:p>
          </table:table-cell>
          <table:table-cell table:number-columns-repeated="16372"/>
        </table:table-row>
        <table:table-row table:style-name="ro10">
          <table:table-cell table:style-name="ce353"/>
          <table:table-cell table:style-name="ce356" office:value-type="string" calcext:value-type="string">
            <text:p>Diesel B5</text:p>
          </table:table-cell>
          <table:table-cell table:style-name="ce373" office:value-type="string" calcext:value-type="string">
            <text:p>Galón</text:p>
          </table:table-cell>
          <table:table-cell table:style-name="ce376" table:formula="of:=+[.E22]*12" office:value-type="float" office:value="18646.501265085" calcext:value-type="float">
            <text:p>18647</text:p>
          </table:table-cell>
          <table:table-cell table:style-name="ce378" table:formula="of:=+[.$C$17]*[.K7]" office:value-type="float" office:value="1553.87510542375" calcext:value-type="float">
            <text:p>1554</text:p>
          </table:table-cell>
          <table:table-cell table:style-name="ce378" table:formula="of:=+[.E22]/30" office:value-type="float" office:value="51.7958368474584" calcext:value-type="float">
            <text:p>52</text:p>
          </table:table-cell>
          <table:table-cell/>
          <table:table-cell table:style-name="ce356" office:value-type="string" calcext:value-type="string">
            <text:p>Diesel B5</text:p>
          </table:table-cell>
          <table:table-cell table:style-name="ce373" table:formula="of:=+[.C7]" office:value-type="float" office:value="12.99" calcext:value-type="float">
            <text:p>12.99</text:p>
          </table:table-cell>
          <table:table-cell table:style-name="ce376" table:formula="of:=+[.$I$22]*[.D22]" office:value-type="float" office:value="242218.051433454" calcext:value-type="float">
            <text:p>242218</text:p>
          </table:table-cell>
          <table:table-cell table:style-name="ce376" table:formula="of:=+[.$I$22]*[.E22]" office:value-type="float" office:value="20184.8376194545" calcext:value-type="float">
            <text:p>20185</text:p>
          </table:table-cell>
          <table:table-cell table:style-name="ce376" table:formula="of:=+[.$I$22]*[.F22]" office:value-type="float" office:value="672.827920648485" calcext:value-type="float">
            <text:p>673</text:p>
          </table:table-cell>
          <table:table-cell table:number-columns-repeated="16372"/>
        </table:table-row>
        <table:table-row table:style-name="ro9">
          <table:table-cell table:style-name="ce353"/>
          <table:table-cell table:style-name="ce356" office:value-type="string" calcext:value-type="string">
            <text:p>Gasohol 90</text:p>
          </table:table-cell>
          <table:table-cell table:style-name="ce373" office:value-type="string" calcext:value-type="string">
            <text:p>Galón</text:p>
          </table:table-cell>
          <table:table-cell table:style-name="ce376" table:formula="of:=+[.E23]*12" office:value-type="float" office:value="14032.2458134595" calcext:value-type="float">
            <text:p>14032</text:p>
          </table:table-cell>
          <table:table-cell table:style-name="ce378" table:formula="of:=+[.$C$17]*[.K8]" office:value-type="float" office:value="1169.35381778829" calcext:value-type="float">
            <text:p>1169</text:p>
          </table:table-cell>
          <table:table-cell table:style-name="ce378" table:formula="of:=+[.E23]/30" office:value-type="float" office:value="38.978460592943" calcext:value-type="float">
            <text:p>39</text:p>
          </table:table-cell>
          <table:table-cell/>
          <table:table-cell table:style-name="ce356" office:value-type="string" calcext:value-type="string">
            <text:p>Gasohol 90</text:p>
          </table:table-cell>
          <table:table-cell table:style-name="ce373" table:formula="of:=+[.C8]" office:value-type="float" office:value="13.034" calcext:value-type="float">
            <text:p>13.03</text:p>
          </table:table-cell>
          <table:table-cell table:style-name="ce376" table:formula="of:=+[.D23]*[.$I$23]" office:value-type="float" office:value="182896.291932631" calcext:value-type="float">
            <text:p>182896</text:p>
          </table:table-cell>
          <table:table-cell table:style-name="ce376" table:formula="of:=+[.E23]*[.$I$23]" office:value-type="float" office:value="15241.3576610526" calcext:value-type="float">
            <text:p>15241</text:p>
          </table:table-cell>
          <table:table-cell table:style-name="ce376" table:formula="of:=+[.F23]*[.$I$23]" office:value-type="float" office:value="508.045255368419" calcext:value-type="float">
            <text:p>508</text:p>
          </table:table-cell>
          <table:table-cell table:number-columns-repeated="16372"/>
        </table:table-row>
        <table:table-row table:style-name="ro9">
          <table:table-cell table:style-name="ce353"/>
          <table:table-cell table:style-name="ce356" office:value-type="string" calcext:value-type="string">
            <text:p>Gasohol 95</text:p>
          </table:table-cell>
          <table:table-cell table:style-name="ce373" office:value-type="string" calcext:value-type="string">
            <text:p>Galón</text:p>
          </table:table-cell>
          <table:table-cell table:style-name="ce376" table:formula="of:=+[.E24]*12" office:value-type="float" office:value="3682.45432778328" calcext:value-type="float">
            <text:p>3682</text:p>
          </table:table-cell>
          <table:table-cell table:style-name="ce378" table:formula="of:=+[.$C$17]*[.K9]" office:value-type="float" office:value="306.87119398194" calcext:value-type="float">
            <text:p>307</text:p>
          </table:table-cell>
          <table:table-cell table:style-name="ce378" table:formula="of:=+[.E24]/30" office:value-type="float" office:value="10.229039799398" calcext:value-type="float">
            <text:p>10</text:p>
          </table:table-cell>
          <table:table-cell/>
          <table:table-cell table:style-name="ce356" office:value-type="string" calcext:value-type="string">
            <text:p>Gasohol 95</text:p>
          </table:table-cell>
          <table:table-cell table:style-name="ce373" table:formula="of:=+[.C9]" office:value-type="float" office:value="13.9929" calcext:value-type="float">
            <text:p>13.99</text:p>
          </table:table-cell>
          <table:table-cell table:style-name="ce376" table:formula="of:=+[.D24]*[.$I$24]" office:value-type="float" office:value="51528.2151632387" calcext:value-type="float">
            <text:p>51528</text:p>
          </table:table-cell>
          <table:table-cell table:style-name="ce376" table:formula="of:=+[.E24]*[.$I$24]" office:value-type="float" office:value="4294.01793026989" calcext:value-type="float">
            <text:p>4294</text:p>
          </table:table-cell>
          <table:table-cell table:style-name="ce376" table:formula="of:=+[.F24]*[.$I$24]" office:value-type="float" office:value="143.133931008996" calcext:value-type="float">
            <text:p>143</text:p>
          </table:table-cell>
          <table:table-cell table:number-columns-repeated="16372"/>
        </table:table-row>
        <table:table-row table:style-name="ro9">
          <table:table-cell table:style-name="ce353"/>
          <table:table-cell table:style-name="ce358" office:value-type="string" calcext:value-type="string" table:number-columns-spanned="2" table:number-rows-spanned="1">
            <text:p>Total</text:p>
          </table:table-cell>
          <table:covered-table-cell table:style-name="ce374"/>
          <table:table-cell table:style-name="ce377" table:formula="of:=SUM([.D22:.D24])" office:value-type="float" office:value="36361.2014063278" calcext:value-type="float">
            <text:p>36361</text:p>
          </table:table-cell>
          <table:table-cell table:style-name="ce379" table:formula="of:=SUM([.E22:.E24])" office:value-type="float" office:value="3030.10011719398" calcext:value-type="float">
            <text:p>3030</text:p>
          </table:table-cell>
          <table:table-cell table:style-name="ce379" table:formula="of:=SUM([.F22:.F24])" office:value-type="float" office:value="101.003337239799" calcext:value-type="float">
            <text:p>101</text:p>
          </table:table-cell>
          <table:table-cell/>
          <table:table-cell table:style-name="ce358" office:value-type="string" calcext:value-type="string" table:number-columns-spanned="2" table:number-rows-spanned="1">
            <text:p>Total</text:p>
          </table:table-cell>
          <table:covered-table-cell table:style-name="ce374"/>
          <table:table-cell table:style-name="ce377" table:formula="of:=SUM([.J22:.J24])" office:value-type="float" office:value="476642.558529324" calcext:value-type="float">
            <text:p>476643</text:p>
          </table:table-cell>
          <table:table-cell table:style-name="ce377" table:formula="of:=SUM([.K22:.K24])" office:value-type="float" office:value="39720.213210777" calcext:value-type="float">
            <text:p>39720</text:p>
          </table:table-cell>
          <table:table-cell table:style-name="ce377" table:formula="of:=SUM([.L22:.L24])" office:value-type="float" office:value="1324.0071070259" calcext:value-type="float">
            <text:p>1324</text:p>
          </table:table-cell>
          <table:table-cell table:number-columns-repeated="16372"/>
        </table:table-row>
        <table:table-row table:style-name="ro9">
          <table:table-cell table:style-name="ce353" table:number-columns-repeated="6"/>
          <table:table-cell table:number-columns-repeated="16378"/>
        </table:table-row>
        <table:table-row table:style-name="ro9">
          <table:table-cell table:style-name="ce353"/>
          <table:table-cell table:style-name="ce364"/>
          <table:table-cell table:style-name="ce353" table:number-columns-repeated="4"/>
          <table:table-cell table:number-columns-repeated="16378"/>
        </table:table-row>
        <table:table-row table:style-name="ro9">
          <table:table-cell table:style-name="ce353"/>
          <table:table-cell table:number-columns-repeated="16383"/>
        </table:table-row>
        <table:table-row table:style-name="ro10">
          <table:table-cell table:style-name="ce353"/>
          <table:table-cell table:number-columns-repeated="16383"/>
        </table:table-row>
        <table:table-row table:style-name="ro18">
          <table:table-cell table:style-name="ce353"/>
          <table:table-cell table:number-columns-repeated="11"/>
          <table:table-cell table:formula="of:=+LOWER([.G30])">
            <text:p/>
          </table:table-cell>
          <table:table-cell table:number-columns-repeated="16371"/>
        </table:table-row>
        <table:table-row table:style-name="ro9" table:number-rows-repeated="2">
          <table:table-cell table:style-name="ce353"/>
          <table:table-cell table:number-columns-repeated="16383"/>
        </table:table-row>
        <table:table-row table:style-name="ro10" table:number-rows-repeated="2">
          <table:table-cell table:style-name="ce353"/>
          <table:table-cell table:number-columns-repeated="16383"/>
        </table:table-row>
        <table:table-row table:style-name="ro9">
          <table:table-cell table:style-name="ce353" table:number-columns-repeated="6"/>
          <table:table-cell table:number-columns-repeated="16378"/>
        </table:table-row>
        <table:table-row table:style-name="ro9">
          <table:table-cell table:style-name="ce353"/>
          <table:table-cell table:number-columns-repeated="16383"/>
        </table:table-row>
        <table:table-row table:style-name="ro10">
          <table:table-cell table:style-name="ce353"/>
          <table:table-cell table:number-columns-repeated="16383"/>
        </table:table-row>
        <table:table-row table:style-name="ro18">
          <table:table-cell table:style-name="ce353"/>
          <table:table-cell table:number-columns-repeated="16383"/>
        </table:table-row>
        <table:table-row table:style-name="ro9" table:number-rows-repeated="2">
          <table:table-cell table:style-name="ce353"/>
          <table:table-cell table:number-columns-repeated="16383"/>
        </table:table-row>
        <table:table-row table:style-name="ro10" table:number-rows-repeated="2">
          <table:table-cell table:style-name="ce353"/>
          <table:table-cell table:number-columns-repeated="16383"/>
        </table:table-row>
        <table:table-row table:style-name="ro9" table:number-rows-repeated="929">
          <table:table-cell table:style-name="ce353"/>
          <table:table-cell table:number-columns-repeated="16383"/>
        </table:table-row>
        <table:table-row table:style-name="ro1" table:number-rows-repeated="104760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inanciamiento" table:style-name="ta15">
        <table:table-column table:style-name="co46" table:default-cell-style-name="ce385"/>
        <table:table-column table:style-name="co4" table:default-cell-style-name="ce385"/>
        <table:table-column table:style-name="co47" table:number-columns-repeated="4" table:default-cell-style-name="ce385"/>
        <table:table-column table:style-name="co4" table:default-cell-style-name="ce385"/>
        <table:table-column table:style-name="co48" table:number-columns-repeated="3" table:default-cell-style-name="ce400"/>
        <table:table-column table:style-name="co16" table:default-cell-style-name="ce400"/>
        <table:table-column table:style-name="co4" table:number-columns-repeated="16373" table:default-cell-style-name="ce385"/>
        <table:table-row table:style-name="ro13">
          <table:table-cell table:number-columns-repeated="16384"/>
        </table:table-row>
        <table:table-row table:style-name="ro5">
          <table:table-cell/>
          <table:table-cell office:value-type="string" calcext:value-type="string">
            <text:p>TEM</text:p>
          </table:table-cell>
          <table:table-cell table:style-name="ce390" table:formula="of:=+(1+[.D2])^(0.0833333333333333) -1" office:value-type="percentage" office:value="0.010556642322445" calcext:value-type="percentage">
            <text:p>1.06 %</text:p>
          </table:table-cell>
          <table:table-cell table:style-name="ce395" table:formula="of:=+[$Resumen.F10]" office:value-type="percentage" office:value="0.1343" calcext:value-type="percentage">
            <text:p>13.43 %</text:p>
          </table:table-cell>
          <table:table-cell office:value-type="string" calcext:value-type="string">
            <text:p>inflación anual</text:p>
          </table:table-cell>
          <table:table-cell table:style-name="ce396" office:value-type="percentage" office:value="0.029" calcext:value-type="percentage">
            <text:p>3 %</text:p>
          </table:table-cell>
          <table:table-cell table:number-columns-repeated="16378"/>
        </table:table-row>
        <table:table-row table:style-name="ro5">
          <table:table-cell/>
          <table:table-cell office:value-type="string" calcext:value-type="string">
            <text:p>TEM real</text:p>
          </table:table-cell>
          <table:table-cell table:style-name="ce390" table:formula="of:=+((1+[.C2])/(1+[.F4])) -1" office:value-type="percentage" office:value="0.00815207061684431" calcext:value-type="percentage">
            <text:p>0.82 %</text:p>
          </table:table-cell>
          <table:table-cell table:number-columns-repeated="2"/>
          <table:table-cell table:style-name="ce396"/>
          <table:table-cell table:number-columns-repeated="16378"/>
        </table:table-row>
        <table:table-row table:style-name="ro5">
          <table:table-cell/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ños</text:p>
          </table:table-cell>
          <table:table-cell office:value-type="string" calcext:value-type="string">
            <text:p>inflación mensual</text:p>
          </table:table-cell>
          <table:table-cell table:style-name="ce397" table:formula="of:=+(1+[.F2])^(1/12) -1" office:value-type="percentage" office:value="0.00238512797392709" calcext:value-type="percentage">
            <text:p>0.2%</text:p>
          </table:table-cell>
          <table:table-cell table:number-columns-repeated="16378"/>
        </table:table-row>
        <table:table-row table:style-name="ro13">
          <table:table-cell/>
          <table:table-cell office:value-type="string" calcext:value-type="string">
            <text:p>P</text:p>
          </table:table-cell>
          <table:table-cell table:style-name="ce391" table:formula="of:=+[$'Inversión inicial'.I10]" office:value-type="float" office:value="350000" calcext:value-type="float">
            <text:p>350,000.00</text:p>
          </table:table-cell>
          <table:table-cell table:number-columns-repeated="16381"/>
        </table:table-row>
        <table:table-row table:style-name="ro13">
          <table:table-cell/>
          <table:table-cell office:value-type="string" calcext:value-type="string">
            <text:p>CUOTA</text:p>
          </table:table-cell>
          <table:table-cell table:formula="of:=+[.C5]*[.C3]/(1-(1+[.C3])^(-120))" office:value-type="float" office:value="4583.22135612973" calcext:value-type="float">
            <text:p>4583.22135612973</text:p>
          </table:table-cell>
          <table:table-cell table:number-columns-repeated="16381"/>
        </table:table-row>
        <table:table-row table:style-name="ro13">
          <table:table-cell table:number-columns-repeated="16384"/>
        </table:table-row>
        <table:table-row table:style-name="ro13">
          <table:table-cell table:number-columns-repeated="7"/>
          <table:table-cell table:style-name="ce401" office:value-type="string" calcext:value-type="string" table:number-columns-spanned="4" table:number-rows-spanned="1">
            <text:p>Resumen anual</text:p>
          </table:table-cell>
          <table:covered-table-cell table:number-columns-repeated="3" table:style-name="ce401"/>
          <table:table-cell table:number-columns-repeated="16373"/>
        </table:table-row>
        <table:table-row table:style-name="ro13">
          <table:table-cell/>
          <table:table-cell table:style-name="ce386" office:value-type="string" calcext:value-type="string">
            <text:p>n</text:p>
          </table:table-cell>
          <table:table-cell table:style-name="ce386" office:value-type="string" calcext:value-type="string">
            <text:p>cuota </text:p>
          </table:table-cell>
          <table:table-cell table:style-name="ce386" office:value-type="string" calcext:value-type="string">
            <text:p>capital</text:p>
          </table:table-cell>
          <table:table-cell table:style-name="ce386" office:value-type="string" calcext:value-type="string">
            <text:p>interés</text:p>
          </table:table-cell>
          <table:table-cell table:style-name="ce386" office:value-type="string" calcext:value-type="string">
            <text:p>saldo</text:p>
          </table:table-cell>
          <table:table-cell table:style-name="ce391"/>
          <table:table-cell table:style-name="ce402" office:value-type="string" calcext:value-type="string">
            <text:p>cuota </text:p>
          </table:table-cell>
          <table:table-cell table:style-name="ce402" office:value-type="string" calcext:value-type="string">
            <text:p>capital</text:p>
          </table:table-cell>
          <table:table-cell table:style-name="ce402" office:value-type="string" calcext:value-type="string">
            <text:p>interés</text:p>
          </table:table-cell>
          <table:table-cell table:style-name="ce402" office:value-type="string" calcext:value-type="string">
            <text:p>saldo</text:p>
          </table:table-cell>
          <table:table-cell table:number-columns-repeated="16373"/>
        </table:table-row>
        <table:table-row table:style-name="ro13">
          <table:table-cell/>
          <table:table-cell table:style-name="ce387" office:value-type="float" office:value="0" calcext:value-type="float">
            <text:p>0</text:p>
          </table:table-cell>
          <table:table-cell table:style-name="ce388" table:number-columns-repeated="3"/>
          <table:table-cell table:style-name="ce394" table:formula="of:=+[.C5]" office:value-type="float" office:value="350000" calcext:value-type="float">
            <text:p>350,000.00</text:p>
          </table:table-cell>
          <table:table-cell table:style-name="ce391"/>
          <table:table-cell table:style-name="ce394" table:number-columns-repeated="3"/>
          <table:table-cell table:style-name="ce394" table:formula="of:=+[.F10]" office:value-type="float" office:value="350000" calcext:value-type="float">
            <text:p>350,000.00</text:p>
          </table:table-cell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1" calcext:value-type="float">
            <text:p>1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11]-[.E11]" office:value-type="float" office:value="1729.99664023422" calcext:value-type="float">
            <text:p>1730.00</text:p>
          </table:table-cell>
          <table:table-cell table:style-name="ce392" table:formula="of:=+[.$C$3]*[.F10]" office:value-type="float" office:value="2853.22471589551" calcext:value-type="float">
            <text:p>2853.22</text:p>
          </table:table-cell>
          <table:table-cell table:style-name="ce392" table:formula="of:=+[.F10]-[.D11]" office:value-type="float" office:value="348270.003359766" calcext:value-type="float">
            <text:p>348270.00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2" calcext:value-type="float">
            <text:p>2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12]-[.E12]" office:value-type="float" office:value="1744.09969501232" calcext:value-type="float">
            <text:p>1744.10</text:p>
          </table:table-cell>
          <table:table-cell table:style-name="ce392" table:formula="of:=+[.$C$3]*[.F11]" office:value-type="float" office:value="2839.12166111742" calcext:value-type="float">
            <text:p>2839.12</text:p>
          </table:table-cell>
          <table:table-cell table:style-name="ce392" table:formula="of:=+[.F11]-[.D12]" office:value-type="float" office:value="346525.903664754" calcext:value-type="float">
            <text:p>346525.90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3" calcext:value-type="float">
            <text:p>3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13]-[.E13]" office:value-type="float" office:value="1758.31771888887" calcext:value-type="float">
            <text:p>1758.32</text:p>
          </table:table-cell>
          <table:table-cell table:style-name="ce392" table:formula="of:=+[.$C$3]*[.F12]" office:value-type="float" office:value="2824.90363724086" calcext:value-type="float">
            <text:p>2824.90</text:p>
          </table:table-cell>
          <table:table-cell table:style-name="ce392" table:formula="of:=+[.F12]-[.D13]" office:value-type="float" office:value="344767.585945865" calcext:value-type="float">
            <text:p>344767.59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4" calcext:value-type="float">
            <text:p>4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14]-[.E14]" office:value-type="float" office:value="1772.6516491001" calcext:value-type="float">
            <text:p>1772.65</text:p>
          </table:table-cell>
          <table:table-cell table:style-name="ce392" table:formula="of:=+[.$C$3]*[.F13]" office:value-type="float" office:value="2810.56970702963" calcext:value-type="float">
            <text:p>2810.57</text:p>
          </table:table-cell>
          <table:table-cell table:style-name="ce392" table:formula="of:=+[.F13]-[.D14]" office:value-type="float" office:value="342994.934296765" calcext:value-type="float">
            <text:p>342994.93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5" calcext:value-type="float">
            <text:p>5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15]-[.E15]" office:value-type="float" office:value="1787.10243052263" calcext:value-type="float">
            <text:p>1787.10</text:p>
          </table:table-cell>
          <table:table-cell table:style-name="ce392" table:formula="of:=+[.$C$3]*[.F14]" office:value-type="float" office:value="2796.1189256071" calcext:value-type="float">
            <text:p>2796.12</text:p>
          </table:table-cell>
          <table:table-cell table:style-name="ce392" table:formula="of:=+[.F14]-[.D15]" office:value-type="float" office:value="341207.831866242" calcext:value-type="float">
            <text:p>341207.83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6" calcext:value-type="float">
            <text:p>6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16]-[.E16]" office:value-type="float" office:value="1801.67101573579" calcext:value-type="float">
            <text:p>1801.67</text:p>
          </table:table-cell>
          <table:table-cell table:style-name="ce392" table:formula="of:=+[.$C$3]*[.F15]" office:value-type="float" office:value="2781.55034039394" calcext:value-type="float">
            <text:p>2781.55</text:p>
          </table:table-cell>
          <table:table-cell table:style-name="ce392" table:formula="of:=+[.F15]-[.D16]" office:value-type="float" office:value="339406.160850506" calcext:value-type="float">
            <text:p>339406.16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7" calcext:value-type="float">
            <text:p>7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17]-[.E17]" office:value-type="float" office:value="1816.35836508439" calcext:value-type="float">
            <text:p>1816.36</text:p>
          </table:table-cell>
          <table:table-cell table:style-name="ce392" table:formula="of:=+[.$C$3]*[.F16]" office:value-type="float" office:value="2766.86299104534" calcext:value-type="float">
            <text:p>2766.86</text:p>
          </table:table-cell>
          <table:table-cell table:style-name="ce392" table:formula="of:=+[.F16]-[.D17]" office:value-type="float" office:value="337589.802485422" calcext:value-type="float">
            <text:p>337589.80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8" calcext:value-type="float">
            <text:p>8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18]-[.E18]" office:value-type="float" office:value="1831.16544674205" calcext:value-type="float">
            <text:p>1831.17</text:p>
          </table:table-cell>
          <table:table-cell table:style-name="ce392" table:formula="of:=+[.$C$3]*[.F17]" office:value-type="float" office:value="2752.05590938768" calcext:value-type="float">
            <text:p>2752.06</text:p>
          </table:table-cell>
          <table:table-cell table:style-name="ce392" table:formula="of:=+[.F17]-[.D18]" office:value-type="float" office:value="335758.63703868" calcext:value-type="float">
            <text:p>335758.64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9" calcext:value-type="float">
            <text:p>9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19]-[.E19]" office:value-type="float" office:value="1846.09323677502" calcext:value-type="float">
            <text:p>1846.09</text:p>
          </table:table-cell>
          <table:table-cell table:style-name="ce392" table:formula="of:=+[.$C$3]*[.F18]" office:value-type="float" office:value="2737.12811935471" calcext:value-type="float">
            <text:p>2737.13</text:p>
          </table:table-cell>
          <table:table-cell table:style-name="ce392" table:formula="of:=+[.F18]-[.D19]" office:value-type="float" office:value="333912.543801905" calcext:value-type="float">
            <text:p>333912.54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10" calcext:value-type="float">
            <text:p>10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20]-[.E20]" office:value-type="float" office:value="1861.14271920649" calcext:value-type="float">
            <text:p>1861.14</text:p>
          </table:table-cell>
          <table:table-cell table:style-name="ce392" table:formula="of:=+[.$C$3]*[.F19]" office:value-type="float" office:value="2722.07863692325" calcext:value-type="float">
            <text:p>2722.08</text:p>
          </table:table-cell>
          <table:table-cell table:style-name="ce392" table:formula="of:=+[.F19]-[.D20]" office:value-type="float" office:value="332051.401082698" calcext:value-type="float">
            <text:p>332051.40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11" calcext:value-type="float">
            <text:p>11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21]-[.E21]" office:value-type="float" office:value="1876.31488608148" calcext:value-type="float">
            <text:p>1876.31</text:p>
          </table:table-cell>
          <table:table-cell table:style-name="ce392" table:formula="of:=+[.$C$3]*[.F20]" office:value-type="float" office:value="2706.90647004825" calcext:value-type="float">
            <text:p>2706.91</text:p>
          </table:table-cell>
          <table:table-cell table:style-name="ce392" table:formula="of:=+[.F20]-[.D21]" office:value-type="float" office:value="330175.086196617" calcext:value-type="float">
            <text:p>330175.09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>
          <table:table-cell/>
          <table:table-cell table:style-name="ce387" office:value-type="float" office:value="12" calcext:value-type="float">
            <text:p>12</text:p>
          </table:table-cell>
          <table:table-cell table:style-name="ce393" table:formula="of:=+[.$C$6]" office:value-type="float" office:value="4583.22135612973" calcext:value-type="float">
            <text:p>4583.22</text:p>
          </table:table-cell>
          <table:table-cell table:style-name="ce393" table:formula="of:=+[.C22]-[.E22]" office:value-type="float" office:value="1891.61073753226" calcext:value-type="float">
            <text:p>1891.61</text:p>
          </table:table-cell>
          <table:table-cell table:style-name="ce393" table:formula="of:=+[.$C$3]*[.F21]" office:value-type="float" office:value="2691.61061859748" calcext:value-type="float">
            <text:p>2691.61</text:p>
          </table:table-cell>
          <table:table-cell table:style-name="ce393" table:formula="of:=+[.F21]-[.D22]" office:value-type="float" office:value="328283.475459084" calcext:value-type="float">
            <text:p>328283.48</text:p>
          </table:table-cell>
          <table:table-cell table:style-name="ce391"/>
          <table:table-cell table:style-name="ce394" table:formula="of:=SUM([.C11:.C22])" office:value-type="float" office:value="54998.6562735568" calcext:value-type="float">
            <text:p>54,998.66</text:p>
          </table:table-cell>
          <table:table-cell table:style-name="ce394" table:formula="of:=SUM([.D11:.D22])" office:value-type="float" office:value="21716.5245409156" calcext:value-type="float">
            <text:p>21,716.52</text:p>
          </table:table-cell>
          <table:table-cell table:style-name="ce394" table:formula="of:=SUM([.E11:.E22])" office:value-type="float" office:value="33282.1317326412" calcext:value-type="float">
            <text:p>33,282.13</text:p>
          </table:table-cell>
          <table:table-cell table:style-name="ce394" table:formula="of:=+[.F22]" office:value-type="float" office:value="328283.475459084" calcext:value-type="float">
            <text:p>328,283.48</text:p>
          </table:table-cell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13" calcext:value-type="float">
            <text:p>13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23]-[.E23]" office:value-type="float" office:value="1907.0312818442" calcext:value-type="float">
            <text:p>1907.03</text:p>
          </table:table-cell>
          <table:table-cell table:style-name="ce392" table:formula="of:=+[.$C$3]*[.F22]" office:value-type="float" office:value="2676.19007428553" calcext:value-type="float">
            <text:p>2676.19</text:p>
          </table:table-cell>
          <table:table-cell table:style-name="ce392" table:formula="of:=+[.F22]-[.D23]" office:value-type="float" office:value="326376.44417724" calcext:value-type="float">
            <text:p>326376.44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14" calcext:value-type="float">
            <text:p>14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24]-[.E24]" office:value-type="float" office:value="1922.57753552232" calcext:value-type="float">
            <text:p>1922.58</text:p>
          </table:table-cell>
          <table:table-cell table:style-name="ce392" table:formula="of:=+[.$C$3]*[.F23]" office:value-type="float" office:value="2660.64382060741" calcext:value-type="float">
            <text:p>2660.64</text:p>
          </table:table-cell>
          <table:table-cell table:style-name="ce392" table:formula="of:=+[.F23]-[.D24]" office:value-type="float" office:value="324453.866641718" calcext:value-type="float">
            <text:p>324453.87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15" calcext:value-type="float">
            <text:p>15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25]-[.E25]" office:value-type="float" office:value="1938.25052335826" calcext:value-type="float">
            <text:p>1938.25</text:p>
          </table:table-cell>
          <table:table-cell table:style-name="ce392" table:formula="of:=+[.$C$3]*[.F24]" office:value-type="float" office:value="2644.97083277147" calcext:value-type="float">
            <text:p>2644.97</text:p>
          </table:table-cell>
          <table:table-cell table:style-name="ce392" table:formula="of:=+[.F24]-[.D25]" office:value-type="float" office:value="322515.61611836" calcext:value-type="float">
            <text:p>322515.62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16" calcext:value-type="float">
            <text:p>16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26]-[.E26]" office:value-type="float" office:value="1954.05127849781" calcext:value-type="float">
            <text:p>1954.05</text:p>
          </table:table-cell>
          <table:table-cell table:style-name="ce392" table:formula="of:=+[.$C$3]*[.F25]" office:value-type="float" office:value="2629.17007763192" calcext:value-type="float">
            <text:p>2629.17</text:p>
          </table:table-cell>
          <table:table-cell table:style-name="ce392" table:formula="of:=+[.F25]-[.D26]" office:value-type="float" office:value="320561.564839862" calcext:value-type="float">
            <text:p>320561.56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17" calcext:value-type="float">
            <text:p>17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27]-[.E27]" office:value-type="float" office:value="1969.98084250906" calcext:value-type="float">
            <text:p>1969.98</text:p>
          </table:table-cell>
          <table:table-cell table:style-name="ce392" table:formula="of:=+[.$C$3]*[.F26]" office:value-type="float" office:value="2613.24051362067" calcext:value-type="float">
            <text:p>2613.24</text:p>
          </table:table-cell>
          <table:table-cell table:style-name="ce392" table:formula="of:=+[.F26]-[.D27]" office:value-type="float" office:value="318591.583997353" calcext:value-type="float">
            <text:p>318591.58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18" calcext:value-type="float">
            <text:p>18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28]-[.E28]" office:value-type="float" office:value="1986.04026545103" calcext:value-type="float">
            <text:p>1986.04</text:p>
          </table:table-cell>
          <table:table-cell table:style-name="ce392" table:formula="of:=+[.$C$3]*[.F27]" office:value-type="float" office:value="2597.18109067871" calcext:value-type="float">
            <text:p>2597.18</text:p>
          </table:table-cell>
          <table:table-cell table:style-name="ce392" table:formula="of:=+[.F27]-[.D28]" office:value-type="float" office:value="316605.543731902" calcext:value-type="float">
            <text:p>316605.54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19" calcext:value-type="float">
            <text:p>19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29]-[.E29]" office:value-type="float" office:value="2002.23060594288" calcext:value-type="float">
            <text:p>2002.23</text:p>
          </table:table-cell>
          <table:table-cell table:style-name="ce392" table:formula="of:=+[.$C$3]*[.F28]" office:value-type="float" office:value="2580.99075018685" calcext:value-type="float">
            <text:p>2580.99</text:p>
          </table:table-cell>
          <table:table-cell table:style-name="ce392" table:formula="of:=+[.F28]-[.D29]" office:value-type="float" office:value="314603.313125959" calcext:value-type="float">
            <text:p>314603.31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20" calcext:value-type="float">
            <text:p>20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30]-[.E30]" office:value-type="float" office:value="2018.55293123373" calcext:value-type="float">
            <text:p>2018.55</text:p>
          </table:table-cell>
          <table:table-cell table:style-name="ce392" table:formula="of:=+[.$C$3]*[.F29]" office:value-type="float" office:value="2564.668424896" calcext:value-type="float">
            <text:p>2564.67</text:p>
          </table:table-cell>
          <table:table-cell table:style-name="ce392" table:formula="of:=+[.F29]-[.D30]" office:value-type="float" office:value="312584.760194725" calcext:value-type="float">
            <text:p>312584.76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21" calcext:value-type="float">
            <text:p>21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31]-[.E31]" office:value-type="float" office:value="2035.00831727299" calcext:value-type="float">
            <text:p>2035.01</text:p>
          </table:table-cell>
          <table:table-cell table:style-name="ce392" table:formula="of:=+[.$C$3]*[.F30]" office:value-type="float" office:value="2548.21303885674" calcext:value-type="float">
            <text:p>2548.21</text:p>
          </table:table-cell>
          <table:table-cell table:style-name="ce392" table:formula="of:=+[.F30]-[.D31]" office:value-type="float" office:value="310549.751877452" calcext:value-type="float">
            <text:p>310549.75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22" calcext:value-type="float">
            <text:p>22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32]-[.E32]" office:value-type="float" office:value="2051.59784878126" calcext:value-type="float">
            <text:p>2051.60</text:p>
          </table:table-cell>
          <table:table-cell table:style-name="ce392" table:formula="of:=+[.$C$3]*[.F31]" office:value-type="float" office:value="2531.62350734847" calcext:value-type="float">
            <text:p>2531.62</text:p>
          </table:table-cell>
          <table:table-cell table:style-name="ce392" table:formula="of:=+[.F31]-[.D32]" office:value-type="float" office:value="308498.154028671" calcext:value-type="float">
            <text:p>308498.15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23" calcext:value-type="float">
            <text:p>23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33]-[.E33]" office:value-type="float" office:value="2068.32261932189" calcext:value-type="float">
            <text:p>2068.32</text:p>
          </table:table-cell>
          <table:table-cell table:style-name="ce392" table:formula="of:=+[.$C$3]*[.F32]" office:value-type="float" office:value="2514.89873680784" calcext:value-type="float">
            <text:p>2514.90</text:p>
          </table:table-cell>
          <table:table-cell table:style-name="ce392" table:formula="of:=+[.F32]-[.D33]" office:value-type="float" office:value="306429.831409349" calcext:value-type="float">
            <text:p>306429.83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>
          <table:table-cell/>
          <table:table-cell table:style-name="ce387" office:value-type="float" office:value="24" calcext:value-type="float">
            <text:p>24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34]-[.E34]" office:value-type="float" office:value="2085.18373137302" calcext:value-type="float">
            <text:p>2085.18</text:p>
          </table:table-cell>
          <table:table-cell table:style-name="ce392" table:formula="of:=+[.$C$3]*[.F33]" office:value-type="float" office:value="2498.03762475671" calcext:value-type="float">
            <text:p>2498.04</text:p>
          </table:table-cell>
          <table:table-cell table:style-name="ce392" table:formula="of:=+[.F33]-[.D34]" office:value-type="float" office:value="304344.647677976" calcext:value-type="float">
            <text:p>304344.65</text:p>
          </table:table-cell>
          <table:table-cell table:style-name="ce391"/>
          <table:table-cell table:style-name="ce394" table:formula="of:=SUM([.C23:.C34])" office:value-type="float" office:value="54998.6562735568" calcext:value-type="float">
            <text:p>54,998.66</text:p>
          </table:table-cell>
          <table:table-cell table:style-name="ce394" table:formula="of:=SUM([.D23:.D34])" office:value-type="float" office:value="23938.8277811085" calcext:value-type="float">
            <text:p>23,938.83</text:p>
          </table:table-cell>
          <table:table-cell table:style-name="ce394" table:formula="of:=SUM([.E23:.E34])" office:value-type="float" office:value="31059.8284924483" calcext:value-type="float">
            <text:p>31,059.83</text:p>
          </table:table-cell>
          <table:table-cell table:style-name="ce394" table:formula="of:=+[.F34]" office:value-type="float" office:value="304344.647677976" calcext:value-type="float">
            <text:p>304,344.65</text:p>
          </table:table-cell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25" calcext:value-type="float">
            <text:p>25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35]-[.E35]" office:value-type="float" office:value="2102.18229640027" calcext:value-type="float">
            <text:p>2102.18</text:p>
          </table:table-cell>
          <table:table-cell table:style-name="ce392" table:formula="of:=+[.$C$3]*[.F34]" office:value-type="float" office:value="2481.03905972946" calcext:value-type="float">
            <text:p>2481.04</text:p>
          </table:table-cell>
          <table:table-cell table:style-name="ce392" table:formula="of:=+[.F34]-[.D35]" office:value-type="float" office:value="302242.465381576" calcext:value-type="float">
            <text:p>302242.47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26" calcext:value-type="float">
            <text:p>26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36]-[.E36]" office:value-type="float" office:value="2119.31943493" calcext:value-type="float">
            <text:p>2119.32</text:p>
          </table:table-cell>
          <table:table-cell table:style-name="ce392" table:formula="of:=+[.$C$3]*[.F35]" office:value-type="float" office:value="2463.90192119973" calcext:value-type="float">
            <text:p>2463.90</text:p>
          </table:table-cell>
          <table:table-cell table:style-name="ce392" table:formula="of:=+[.F35]-[.D36]" office:value-type="float" office:value="300123.145946646" calcext:value-type="float">
            <text:p>300123.15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27" calcext:value-type="float">
            <text:p>27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37]-[.E37]" office:value-type="float" office:value="2136.5962766232" calcext:value-type="float">
            <text:p>2136.60</text:p>
          </table:table-cell>
          <table:table-cell table:style-name="ce392" table:formula="of:=+[.$C$3]*[.F36]" office:value-type="float" office:value="2446.62507950653" calcext:value-type="float">
            <text:p>2446.63</text:p>
          </table:table-cell>
          <table:table-cell table:style-name="ce392" table:formula="of:=+[.F36]-[.D37]" office:value-type="float" office:value="297986.549670023" calcext:value-type="float">
            <text:p>297986.55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28" calcext:value-type="float">
            <text:p>28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38]-[.E38]" office:value-type="float" office:value="2154.01396034992" calcext:value-type="float">
            <text:p>2154.01</text:p>
          </table:table-cell>
          <table:table-cell table:style-name="ce392" table:formula="of:=+[.$C$3]*[.F37]" office:value-type="float" office:value="2429.20739577981" calcext:value-type="float">
            <text:p>2429.21</text:p>
          </table:table-cell>
          <table:table-cell table:style-name="ce392" table:formula="of:=+[.F37]-[.D38]" office:value-type="float" office:value="295832.535709673" calcext:value-type="float">
            <text:p>295832.54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29" calcext:value-type="float">
            <text:p>29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39]-[.E39]" office:value-type="float" office:value="2171.57363426436" calcext:value-type="float">
            <text:p>2171.57</text:p>
          </table:table-cell>
          <table:table-cell table:style-name="ce392" table:formula="of:=+[.$C$3]*[.F38]" office:value-type="float" office:value="2411.64772186537" calcext:value-type="float">
            <text:p>2411.65</text:p>
          </table:table-cell>
          <table:table-cell table:style-name="ce392" table:formula="of:=+[.F38]-[.D39]" office:value-type="float" office:value="293660.962075408" calcext:value-type="float">
            <text:p>293660.96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30" calcext:value-type="float">
            <text:p>30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40]-[.E40]" office:value-type="float" office:value="2189.27645588056" calcext:value-type="float">
            <text:p>2189.28</text:p>
          </table:table-cell>
          <table:table-cell table:style-name="ce392" table:formula="of:=+[.$C$3]*[.F39]" office:value-type="float" office:value="2393.94490024917" calcext:value-type="float">
            <text:p>2393.94</text:p>
          </table:table-cell>
          <table:table-cell table:style-name="ce392" table:formula="of:=+[.F39]-[.D40]" office:value-type="float" office:value="291471.685619528" calcext:value-type="float">
            <text:p>291471.69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31" calcext:value-type="float">
            <text:p>31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41]-[.E41]" office:value-type="float" office:value="2207.1235921487" calcext:value-type="float">
            <text:p>2207.12</text:p>
          </table:table-cell>
          <table:table-cell table:style-name="ce392" table:formula="of:=+[.$C$3]*[.F40]" office:value-type="float" office:value="2376.09776398103" calcext:value-type="float">
            <text:p>2376.10</text:p>
          </table:table-cell>
          <table:table-cell table:style-name="ce392" table:formula="of:=+[.F40]-[.D41]" office:value-type="float" office:value="289264.562027379" calcext:value-type="float">
            <text:p>289264.56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32" calcext:value-type="float">
            <text:p>32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42]-[.E42]" office:value-type="float" office:value="2225.116219532" calcext:value-type="float">
            <text:p>2225.12</text:p>
          </table:table-cell>
          <table:table-cell table:style-name="ce392" table:formula="of:=+[.$C$3]*[.F41]" office:value-type="float" office:value="2358.10513659774" calcext:value-type="float">
            <text:p>2358.11</text:p>
          </table:table-cell>
          <table:table-cell table:style-name="ce392" table:formula="of:=+[.F41]-[.D42]" office:value-type="float" office:value="287039.445807847" calcext:value-type="float">
            <text:p>287039.45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33" calcext:value-type="float">
            <text:p>33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43]-[.E43]" office:value-type="float" office:value="2243.25552408431" calcext:value-type="float">
            <text:p>2243.26</text:p>
          </table:table-cell>
          <table:table-cell table:style-name="ce392" table:formula="of:=+[.$C$3]*[.F42]" office:value-type="float" office:value="2339.96583204542" calcext:value-type="float">
            <text:p>2339.97</text:p>
          </table:table-cell>
          <table:table-cell table:style-name="ce392" table:formula="of:=+[.F42]-[.D43]" office:value-type="float" office:value="284796.190283763" calcext:value-type="float">
            <text:p>284796.19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34" calcext:value-type="float">
            <text:p>34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44]-[.E44]" office:value-type="float" office:value="2261.54270152827" calcext:value-type="float">
            <text:p>2261.54</text:p>
          </table:table-cell>
          <table:table-cell table:style-name="ce392" table:formula="of:=+[.$C$3]*[.F43]" office:value-type="float" office:value="2321.67865460146" calcext:value-type="float">
            <text:p>2321.68</text:p>
          </table:table-cell>
          <table:table-cell table:style-name="ce392" table:formula="of:=+[.F43]-[.D44]" office:value-type="float" office:value="282534.647582234" calcext:value-type="float">
            <text:p>282534.65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35" calcext:value-type="float">
            <text:p>35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45]-[.E45]" office:value-type="float" office:value="2279.97895733414" calcext:value-type="float">
            <text:p>2279.98</text:p>
          </table:table-cell>
          <table:table-cell table:style-name="ce392" table:formula="of:=+[.$C$3]*[.F44]" office:value-type="float" office:value="2303.2423987956" calcext:value-type="float">
            <text:p>2303.24</text:p>
          </table:table-cell>
          <table:table-cell table:style-name="ce392" table:formula="of:=+[.F44]-[.D45]" office:value-type="float" office:value="280254.6686249" calcext:value-type="float">
            <text:p>280254.67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>
          <table:table-cell/>
          <table:table-cell table:style-name="ce387" office:value-type="float" office:value="36" calcext:value-type="float">
            <text:p>36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46]-[.E46]" office:value-type="float" office:value="2298.56550679924" calcext:value-type="float">
            <text:p>2298.57</text:p>
          </table:table-cell>
          <table:table-cell table:style-name="ce392" table:formula="of:=+[.$C$3]*[.F45]" office:value-type="float" office:value="2284.65584933049" calcext:value-type="float">
            <text:p>2284.66</text:p>
          </table:table-cell>
          <table:table-cell table:style-name="ce392" table:formula="of:=+[.F45]-[.D46]" office:value-type="float" office:value="277956.103118101" calcext:value-type="float">
            <text:p>277956.10</text:p>
          </table:table-cell>
          <table:table-cell table:style-name="ce391"/>
          <table:table-cell table:style-name="ce394" table:formula="of:=SUM([.C35:.C46])" office:value-type="float" office:value="54998.6562735568" calcext:value-type="float">
            <text:p>54,998.66</text:p>
          </table:table-cell>
          <table:table-cell table:style-name="ce394" table:formula="of:=SUM([.D35:.D46])" office:value-type="float" office:value="26388.544559875" calcext:value-type="float">
            <text:p>26,388.54</text:p>
          </table:table-cell>
          <table:table-cell table:style-name="ce394" table:formula="of:=SUM([.E35:.E46])" office:value-type="float" office:value="28610.1117136818" calcext:value-type="float">
            <text:p>28,610.11</text:p>
          </table:table-cell>
          <table:table-cell table:style-name="ce394" table:formula="of:=+[.F46]" office:value-type="float" office:value="277956.103118101" calcext:value-type="float">
            <text:p>277,956.10</text:p>
          </table:table-cell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37" calcext:value-type="float">
            <text:p>37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47]-[.E47]" office:value-type="float" office:value="2317.30357512811" calcext:value-type="float">
            <text:p>2317.30</text:p>
          </table:table-cell>
          <table:table-cell table:style-name="ce392" table:formula="of:=+[.$C$3]*[.F46]" office:value-type="float" office:value="2265.91778100162" calcext:value-type="float">
            <text:p>2265.92</text:p>
          </table:table-cell>
          <table:table-cell table:style-name="ce392" table:formula="of:=+[.F46]-[.D47]" office:value-type="float" office:value="275638.799542973" calcext:value-type="float">
            <text:p>275638.80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38" calcext:value-type="float">
            <text:p>38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48]-[.E48]" office:value-type="float" office:value="2336.19439751322" calcext:value-type="float">
            <text:p>2336.19</text:p>
          </table:table-cell>
          <table:table-cell table:style-name="ce392" table:formula="of:=+[.$C$3]*[.F47]" office:value-type="float" office:value="2247.02695861651" calcext:value-type="float">
            <text:p>2247.03</text:p>
          </table:table-cell>
          <table:table-cell table:style-name="ce392" table:formula="of:=+[.F47]-[.D48]" office:value-type="float" office:value="273302.60514546" calcext:value-type="float">
            <text:p>273302.61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39" calcext:value-type="float">
            <text:p>39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49]-[.E49]" office:value-type="float" office:value="2355.23921921643" calcext:value-type="float">
            <text:p>2355.24</text:p>
          </table:table-cell>
          <table:table-cell table:style-name="ce392" table:formula="of:=+[.$C$3]*[.F48]" office:value-type="float" office:value="2227.9821369133" calcext:value-type="float">
            <text:p>2227.98</text:p>
          </table:table-cell>
          <table:table-cell table:style-name="ce392" table:formula="of:=+[.F48]-[.D49]" office:value-type="float" office:value="270947.365926243" calcext:value-type="float">
            <text:p>270947.37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40" calcext:value-type="float">
            <text:p>40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50]-[.E50]" office:value-type="float" office:value="2374.43929565104" calcext:value-type="float">
            <text:p>2374.44</text:p>
          </table:table-cell>
          <table:table-cell table:style-name="ce392" table:formula="of:=+[.$C$3]*[.F49]" office:value-type="float" office:value="2208.78206047869" calcext:value-type="float">
            <text:p>2208.78</text:p>
          </table:table-cell>
          <table:table-cell table:style-name="ce392" table:formula="of:=+[.F49]-[.D50]" office:value-type="float" office:value="268572.926630592" calcext:value-type="float">
            <text:p>268572.93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41" calcext:value-type="float">
            <text:p>41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51]-[.E51]" office:value-type="float" office:value="2393.7958924646" calcext:value-type="float">
            <text:p>2393.80</text:p>
          </table:table-cell>
          <table:table-cell table:style-name="ce392" table:formula="of:=+[.$C$3]*[.F50]" office:value-type="float" office:value="2189.42546366513" calcext:value-type="float">
            <text:p>2189.43</text:p>
          </table:table-cell>
          <table:table-cell table:style-name="ce392" table:formula="of:=+[.F50]-[.D51]" office:value-type="float" office:value="266179.130738128" calcext:value-type="float">
            <text:p>266179.13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42" calcext:value-type="float">
            <text:p>42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52]-[.E52]" office:value-type="float" office:value="2413.31028562228" calcext:value-type="float">
            <text:p>2413.31</text:p>
          </table:table-cell>
          <table:table-cell table:style-name="ce392" table:formula="of:=+[.$C$3]*[.F51]" office:value-type="float" office:value="2169.91107050745" calcext:value-type="float">
            <text:p>2169.91</text:p>
          </table:table-cell>
          <table:table-cell table:style-name="ce392" table:formula="of:=+[.F51]-[.D52]" office:value-type="float" office:value="263765.820452505" calcext:value-type="float">
            <text:p>263765.82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43" calcext:value-type="float">
            <text:p>43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53]-[.E53]" office:value-type="float" office:value="2432.98376149103" calcext:value-type="float">
            <text:p>2432.98</text:p>
          </table:table-cell>
          <table:table-cell table:style-name="ce392" table:formula="of:=+[.$C$3]*[.F52]" office:value-type="float" office:value="2150.2375946387" calcext:value-type="float">
            <text:p>2150.24</text:p>
          </table:table-cell>
          <table:table-cell table:style-name="ce392" table:formula="of:=+[.F52]-[.D53]" office:value-type="float" office:value="261332.836691014" calcext:value-type="float">
            <text:p>261332.84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44" calcext:value-type="float">
            <text:p>44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54]-[.E54]" office:value-type="float" office:value="2452.81761692434" calcext:value-type="float">
            <text:p>2452.82</text:p>
          </table:table-cell>
          <table:table-cell table:style-name="ce392" table:formula="of:=+[.$C$3]*[.F53]" office:value-type="float" office:value="2130.40373920539" calcext:value-type="float">
            <text:p>2130.40</text:p>
          </table:table-cell>
          <table:table-cell table:style-name="ce392" table:formula="of:=+[.F53]-[.D54]" office:value-type="float" office:value="258880.01907409" calcext:value-type="float">
            <text:p>258880.02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45" calcext:value-type="float">
            <text:p>45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55]-[.E55]" office:value-type="float" office:value="2472.81315934775" calcext:value-type="float">
            <text:p>2472.81</text:p>
          </table:table-cell>
          <table:table-cell table:style-name="ce392" table:formula="of:=+[.$C$3]*[.F54]" office:value-type="float" office:value="2110.40819678198" calcext:value-type="float">
            <text:p>2110.41</text:p>
          </table:table-cell>
          <table:table-cell table:style-name="ce392" table:formula="of:=+[.F54]-[.D55]" office:value-type="float" office:value="256407.205914742" calcext:value-type="float">
            <text:p>256407.21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46" calcext:value-type="float">
            <text:p>46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56]-[.E56]" office:value-type="float" office:value="2492.97170684501" calcext:value-type="float">
            <text:p>2492.97</text:p>
          </table:table-cell>
          <table:table-cell table:style-name="ce392" table:formula="of:=+[.$C$3]*[.F55]" office:value-type="float" office:value="2090.24964928472" calcext:value-type="float">
            <text:p>2090.25</text:p>
          </table:table-cell>
          <table:table-cell table:style-name="ce392" table:formula="of:=+[.F55]-[.D56]" office:value-type="float" office:value="253914.234207897" calcext:value-type="float">
            <text:p>253914.23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47" calcext:value-type="float">
            <text:p>47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57]-[.E57]" office:value-type="float" office:value="2513.29458824501" calcext:value-type="float">
            <text:p>2513.29</text:p>
          </table:table-cell>
          <table:table-cell table:style-name="ce392" table:formula="of:=+[.$C$3]*[.F56]" office:value-type="float" office:value="2069.92676788472" calcext:value-type="float">
            <text:p>2069.93</text:p>
          </table:table-cell>
          <table:table-cell table:style-name="ce392" table:formula="of:=+[.F56]-[.D57]" office:value-type="float" office:value="251400.939619652" calcext:value-type="float">
            <text:p>251400.94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>
          <table:table-cell/>
          <table:table-cell table:style-name="ce387" office:value-type="float" office:value="48" calcext:value-type="float">
            <text:p>48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58]-[.E58]" office:value-type="float" office:value="2533.78314320931" calcext:value-type="float">
            <text:p>2533.78</text:p>
          </table:table-cell>
          <table:table-cell table:style-name="ce392" table:formula="of:=+[.$C$3]*[.F57]" office:value-type="float" office:value="2049.43821292042" calcext:value-type="float">
            <text:p>2049.44</text:p>
          </table:table-cell>
          <table:table-cell table:style-name="ce392" table:formula="of:=+[.F57]-[.D58]" office:value-type="float" office:value="248867.156476443" calcext:value-type="float">
            <text:p>248867.16</text:p>
          </table:table-cell>
          <table:table-cell table:style-name="ce391"/>
          <table:table-cell table:style-name="ce394" table:formula="of:=SUM([.C47:.C58])" office:value-type="float" office:value="54998.6562735568" calcext:value-type="float">
            <text:p>54,998.66</text:p>
          </table:table-cell>
          <table:table-cell table:style-name="ce394" table:formula="of:=SUM([.D47:.D58])" office:value-type="float" office:value="29088.9466416581" calcext:value-type="float">
            <text:p>29,088.95</text:p>
          </table:table-cell>
          <table:table-cell table:style-name="ce394" table:formula="of:=SUM([.E47:.E58])" office:value-type="float" office:value="25909.7096318986" calcext:value-type="float">
            <text:p>25,909.71</text:p>
          </table:table-cell>
          <table:table-cell table:style-name="ce394" table:formula="of:=+[.F58]" office:value-type="float" office:value="248867.156476443" calcext:value-type="float">
            <text:p>248,867.16</text:p>
          </table:table-cell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49" calcext:value-type="float">
            <text:p>49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59]-[.E59]" office:value-type="float" office:value="2554.43872232053" calcext:value-type="float">
            <text:p>2554.44</text:p>
          </table:table-cell>
          <table:table-cell table:style-name="ce392" table:formula="of:=+[.$C$3]*[.F58]" office:value-type="float" office:value="2028.78263380921" calcext:value-type="float">
            <text:p>2028.78</text:p>
          </table:table-cell>
          <table:table-cell table:style-name="ce392" table:formula="of:=+[.F58]-[.D59]" office:value-type="float" office:value="246312.717754122" calcext:value-type="float">
            <text:p>246312.72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50" calcext:value-type="float">
            <text:p>50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60]-[.E60]" office:value-type="float" office:value="2575.26268717128" calcext:value-type="float">
            <text:p>2575.26</text:p>
          </table:table-cell>
          <table:table-cell table:style-name="ce392" table:formula="of:=+[.$C$3]*[.F59]" office:value-type="float" office:value="2007.95866895845" calcext:value-type="float">
            <text:p>2007.96</text:p>
          </table:table-cell>
          <table:table-cell table:style-name="ce392" table:formula="of:=+[.F59]-[.D60]" office:value-type="float" office:value="243737.455066951" calcext:value-type="float">
            <text:p>243737.46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51" calcext:value-type="float">
            <text:p>51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61]-[.E61]" office:value-type="float" office:value="2596.25641045403" calcext:value-type="float">
            <text:p>2596.26</text:p>
          </table:table-cell>
          <table:table-cell table:style-name="ce392" table:formula="of:=+[.$C$3]*[.F60]" office:value-type="float" office:value="1986.9649456757" calcext:value-type="float">
            <text:p>1986.96</text:p>
          </table:table-cell>
          <table:table-cell table:style-name="ce392" table:formula="of:=+[.F60]-[.D61]" office:value-type="float" office:value="241141.198656497" calcext:value-type="float">
            <text:p>241141.20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52" calcext:value-type="float">
            <text:p>52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62]-[.E62]" office:value-type="float" office:value="2617.42127605148" calcext:value-type="float">
            <text:p>2617.42</text:p>
          </table:table-cell>
          <table:table-cell table:style-name="ce392" table:formula="of:=+[.$C$3]*[.F61]" office:value-type="float" office:value="1965.80008007825" calcext:value-type="float">
            <text:p>1965.80</text:p>
          </table:table-cell>
          <table:table-cell table:style-name="ce392" table:formula="of:=+[.F61]-[.D62]" office:value-type="float" office:value="238523.777380446" calcext:value-type="float">
            <text:p>238523.78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53" calcext:value-type="float">
            <text:p>53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63]-[.E63]" office:value-type="float" office:value="2638.75867912789" calcext:value-type="float">
            <text:p>2638.76</text:p>
          </table:table-cell>
          <table:table-cell table:style-name="ce392" table:formula="of:=+[.$C$3]*[.F62]" office:value-type="float" office:value="1944.46267700184" calcext:value-type="float">
            <text:p>1944.46</text:p>
          </table:table-cell>
          <table:table-cell table:style-name="ce392" table:formula="of:=+[.F62]-[.D63]" office:value-type="float" office:value="235885.018701318" calcext:value-type="float">
            <text:p>235885.02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54" calcext:value-type="float">
            <text:p>54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64]-[.E64]" office:value-type="float" office:value="2660.27002622095" calcext:value-type="float">
            <text:p>2660.27</text:p>
          </table:table-cell>
          <table:table-cell table:style-name="ce392" table:formula="of:=+[.$C$3]*[.F63]" office:value-type="float" office:value="1922.95132990878" calcext:value-type="float">
            <text:p>1922.95</text:p>
          </table:table-cell>
          <table:table-cell table:style-name="ce392" table:formula="of:=+[.F63]-[.D64]" office:value-type="float" office:value="233224.748675097" calcext:value-type="float">
            <text:p>233224.75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55" calcext:value-type="float">
            <text:p>55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65]-[.E65]" office:value-type="float" office:value="2681.95673533458" calcext:value-type="float">
            <text:p>2681.96</text:p>
          </table:table-cell>
          <table:table-cell table:style-name="ce392" table:formula="of:=+[.$C$3]*[.F64]" office:value-type="float" office:value="1901.26462079516" calcext:value-type="float">
            <text:p>1901.26</text:p>
          </table:table-cell>
          <table:table-cell table:style-name="ce392" table:formula="of:=+[.F64]-[.D65]" office:value-type="float" office:value="230542.791939762" calcext:value-type="float">
            <text:p>230542.79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56" calcext:value-type="float">
            <text:p>56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66]-[.E66]" office:value-type="float" office:value="2703.82023603234" calcext:value-type="float">
            <text:p>2703.82</text:p>
          </table:table-cell>
          <table:table-cell table:style-name="ce392" table:formula="of:=+[.$C$3]*[.F65]" office:value-type="float" office:value="1879.40112009739" calcext:value-type="float">
            <text:p>1879.40</text:p>
          </table:table-cell>
          <table:table-cell table:style-name="ce392" table:formula="of:=+[.F65]-[.D66]" office:value-type="float" office:value="227838.97170373" calcext:value-type="float">
            <text:p>227838.97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57" calcext:value-type="float">
            <text:p>57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67]-[.E67]" office:value-type="float" office:value="2725.86196953173" calcext:value-type="float">
            <text:p>2725.86</text:p>
          </table:table-cell>
          <table:table-cell table:style-name="ce392" table:formula="of:=+[.$C$3]*[.F66]" office:value-type="float" office:value="1857.359386598" calcext:value-type="float">
            <text:p>1857.36</text:p>
          </table:table-cell>
          <table:table-cell table:style-name="ce392" table:formula="of:=+[.F66]-[.D67]" office:value-type="float" office:value="225113.109734198" calcext:value-type="float">
            <text:p>225113.11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58" calcext:value-type="float">
            <text:p>58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68]-[.E68]" office:value-type="float" office:value="2748.08338879913" calcext:value-type="float">
            <text:p>2748.08</text:p>
          </table:table-cell>
          <table:table-cell table:style-name="ce392" table:formula="of:=+[.$C$3]*[.F67]" office:value-type="float" office:value="1835.13796733061" calcext:value-type="float">
            <text:p>1835.14</text:p>
          </table:table-cell>
          <table:table-cell table:style-name="ce392" table:formula="of:=+[.F67]-[.D68]" office:value-type="float" office:value="222365.026345399" calcext:value-type="float">
            <text:p>222365.03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59" calcext:value-type="float">
            <text:p>59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69]-[.E69]" office:value-type="float" office:value="2770.48595864559" calcext:value-type="float">
            <text:p>2770.49</text:p>
          </table:table-cell>
          <table:table-cell table:style-name="ce392" table:formula="of:=+[.$C$3]*[.F68]" office:value-type="float" office:value="1812.73539748414" calcext:value-type="float">
            <text:p>1812.74</text:p>
          </table:table-cell>
          <table:table-cell table:style-name="ce392" table:formula="of:=+[.F68]-[.D69]" office:value-type="float" office:value="219594.540386753" calcext:value-type="float">
            <text:p>219594.54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>
          <table:table-cell/>
          <table:table-cell table:style-name="ce387" office:value-type="float" office:value="60" calcext:value-type="float">
            <text:p>60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70]-[.E70]" office:value-type="float" office:value="2793.07115582345" calcext:value-type="float">
            <text:p>2793.07</text:p>
          </table:table-cell>
          <table:table-cell table:style-name="ce392" table:formula="of:=+[.$C$3]*[.F69]" office:value-type="float" office:value="1790.15020030628" calcext:value-type="float">
            <text:p>1790.15</text:p>
          </table:table-cell>
          <table:table-cell table:style-name="ce392" table:formula="of:=+[.F69]-[.D70]" office:value-type="float" office:value="216801.46923093" calcext:value-type="float">
            <text:p>216801.47</text:p>
          </table:table-cell>
          <table:table-cell table:style-name="ce391"/>
          <table:table-cell table:style-name="ce394" table:formula="of:=SUM([.C59:.C70])" office:value-type="float" office:value="54998.6562735568" calcext:value-type="float">
            <text:p>54,998.66</text:p>
          </table:table-cell>
          <table:table-cell table:style-name="ce394" table:formula="of:=SUM([.D59:.D70])" office:value-type="float" office:value="32065.687245513" calcext:value-type="float">
            <text:p>32,065.69</text:p>
          </table:table-cell>
          <table:table-cell table:style-name="ce394" table:formula="of:=SUM([.E59:.E70])" office:value-type="float" office:value="22932.9690280438" calcext:value-type="float">
            <text:p>22,932.97</text:p>
          </table:table-cell>
          <table:table-cell table:style-name="ce394" table:formula="of:=+[.F70]" office:value-type="float" office:value="216801.46923093" calcext:value-type="float">
            <text:p>216,801.47</text:p>
          </table:table-cell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61" calcext:value-type="float">
            <text:p>61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71]-[.E71]" office:value-type="float" office:value="2815.84046912359" calcext:value-type="float">
            <text:p>2815.84</text:p>
          </table:table-cell>
          <table:table-cell table:style-name="ce392" table:formula="of:=+[.$C$3]*[.F70]" office:value-type="float" office:value="1767.38088700614" calcext:value-type="float">
            <text:p>1767.38</text:p>
          </table:table-cell>
          <table:table-cell table:style-name="ce392" table:formula="of:=+[.F70]-[.D71]" office:value-type="float" office:value="213985.628761806" calcext:value-type="float">
            <text:p>213985.63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62" calcext:value-type="float">
            <text:p>62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72]-[.E72]" office:value-type="float" office:value="2838.79539947365" calcext:value-type="float">
            <text:p>2838.80</text:p>
          </table:table-cell>
          <table:table-cell table:style-name="ce392" table:formula="of:=+[.$C$3]*[.F71]" office:value-type="float" office:value="1744.42595665608" calcext:value-type="float">
            <text:p>1744.43</text:p>
          </table:table-cell>
          <table:table-cell table:style-name="ce392" table:formula="of:=+[.F71]-[.D72]" office:value-type="float" office:value="211146.833362333" calcext:value-type="float">
            <text:p>211146.83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63" calcext:value-type="float">
            <text:p>63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73]-[.E73]" office:value-type="float" office:value="2861.93746003694" calcext:value-type="float">
            <text:p>2861.94</text:p>
          </table:table-cell>
          <table:table-cell table:style-name="ce392" table:formula="of:=+[.$C$3]*[.F72]" office:value-type="float" office:value="1721.28389609279" calcext:value-type="float">
            <text:p>1721.28</text:p>
          </table:table-cell>
          <table:table-cell table:style-name="ce392" table:formula="of:=+[.F72]-[.D73]" office:value-type="float" office:value="208284.895902296" calcext:value-type="float">
            <text:p>208284.90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64" calcext:value-type="float">
            <text:p>64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74]-[.E74]" office:value-type="float" office:value="2885.26817631215" calcext:value-type="float">
            <text:p>2885.27</text:p>
          </table:table-cell>
          <table:table-cell table:style-name="ce392" table:formula="of:=+[.$C$3]*[.F73]" office:value-type="float" office:value="1697.95317981758" calcext:value-type="float">
            <text:p>1697.95</text:p>
          </table:table-cell>
          <table:table-cell table:style-name="ce392" table:formula="of:=+[.F73]-[.D74]" office:value-type="float" office:value="205399.627725984" calcext:value-type="float">
            <text:p>205399.63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65" calcext:value-type="float">
            <text:p>65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75]-[.E75]" office:value-type="float" office:value="2908.78908623398" calcext:value-type="float">
            <text:p>2908.79</text:p>
          </table:table-cell>
          <table:table-cell table:style-name="ce392" table:formula="of:=+[.$C$3]*[.F74]" office:value-type="float" office:value="1674.43226989575" calcext:value-type="float">
            <text:p>1674.43</text:p>
          </table:table-cell>
          <table:table-cell table:style-name="ce392" table:formula="of:=+[.F74]-[.D75]" office:value-type="float" office:value="202490.83863975" calcext:value-type="float">
            <text:p>202490.84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66" calcext:value-type="float">
            <text:p>66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76]-[.E76]" office:value-type="float" office:value="2932.50174027447" calcext:value-type="float">
            <text:p>2932.50</text:p>
          </table:table-cell>
          <table:table-cell table:style-name="ce392" table:formula="of:=+[.$C$3]*[.F75]" office:value-type="float" office:value="1650.71961585527" calcext:value-type="float">
            <text:p>1650.72</text:p>
          </table:table-cell>
          <table:table-cell table:style-name="ce392" table:formula="of:=+[.F75]-[.D76]" office:value-type="float" office:value="199558.336899475" calcext:value-type="float">
            <text:p>199558.34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67" calcext:value-type="float">
            <text:p>67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77]-[.E77]" office:value-type="float" office:value="2956.4077015452" calcext:value-type="float">
            <text:p>2956.41</text:p>
          </table:table-cell>
          <table:table-cell table:style-name="ce392" table:formula="of:=+[.$C$3]*[.F76]" office:value-type="float" office:value="1626.81365458453" calcext:value-type="float">
            <text:p>1626.81</text:p>
          </table:table-cell>
          <table:table-cell table:style-name="ce392" table:formula="of:=+[.F76]-[.D77]" office:value-type="float" office:value="196601.92919793" calcext:value-type="float">
            <text:p>196601.93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68" calcext:value-type="float">
            <text:p>68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78]-[.E78]" office:value-type="float" office:value="2980.50854590038" calcext:value-type="float">
            <text:p>2980.51</text:p>
          </table:table-cell>
          <table:table-cell table:style-name="ce392" table:formula="of:=+[.$C$3]*[.F77]" office:value-type="float" office:value="1602.71281022935" calcext:value-type="float">
            <text:p>1602.71</text:p>
          </table:table-cell>
          <table:table-cell table:style-name="ce392" table:formula="of:=+[.F77]-[.D78]" office:value-type="float" office:value="193621.42065203" calcext:value-type="float">
            <text:p>193621.42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69" calcext:value-type="float">
            <text:p>69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79]-[.E79]" office:value-type="float" office:value="3004.80586204067" calcext:value-type="float">
            <text:p>3004.81</text:p>
          </table:table-cell>
          <table:table-cell table:style-name="ce392" table:formula="of:=+[.$C$3]*[.F78]" office:value-type="float" office:value="1578.41549408906" calcext:value-type="float">
            <text:p>1578.42</text:p>
          </table:table-cell>
          <table:table-cell table:style-name="ce392" table:formula="of:=+[.F78]-[.D79]" office:value-type="float" office:value="190616.614789989" calcext:value-type="float">
            <text:p>190616.61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70" calcext:value-type="float">
            <text:p>70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80]-[.E80]" office:value-type="float" office:value="3029.30125161793" calcext:value-type="float">
            <text:p>3029.30</text:p>
          </table:table-cell>
          <table:table-cell table:style-name="ce392" table:formula="of:=+[.$C$3]*[.F79]" office:value-type="float" office:value="1553.9201045118" calcext:value-type="float">
            <text:p>1553.92</text:p>
          </table:table-cell>
          <table:table-cell table:style-name="ce392" table:formula="of:=+[.F79]-[.D80]" office:value-type="float" office:value="187587.313538371" calcext:value-type="float">
            <text:p>187587.31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71" calcext:value-type="float">
            <text:p>71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81]-[.E81]" office:value-type="float" office:value="3053.99632934082" calcext:value-type="float">
            <text:p>3054.00</text:p>
          </table:table-cell>
          <table:table-cell table:style-name="ce392" table:formula="of:=+[.$C$3]*[.F80]" office:value-type="float" office:value="1529.22502678892" calcext:value-type="float">
            <text:p>1529.23</text:p>
          </table:table-cell>
          <table:table-cell table:style-name="ce392" table:formula="of:=+[.F80]-[.D81]" office:value-type="float" office:value="184533.31720903" calcext:value-type="float">
            <text:p>184533.32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>
          <table:table-cell/>
          <table:table-cell table:style-name="ce387" office:value-type="float" office:value="72" calcext:value-type="float">
            <text:p>72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82]-[.E82]" office:value-type="float" office:value="3078.89272308119" calcext:value-type="float">
            <text:p>3078.89</text:p>
          </table:table-cell>
          <table:table-cell table:style-name="ce392" table:formula="of:=+[.$C$3]*[.F81]" office:value-type="float" office:value="1504.32863304855" calcext:value-type="float">
            <text:p>1504.33</text:p>
          </table:table-cell>
          <table:table-cell table:style-name="ce392" table:formula="of:=+[.F81]-[.D82]" office:value-type="float" office:value="181454.424485949" calcext:value-type="float">
            <text:p>181454.42</text:p>
          </table:table-cell>
          <table:table-cell table:style-name="ce391"/>
          <table:table-cell table:style-name="ce394" table:formula="of:=SUM([.C71:.C82])" office:value-type="float" office:value="54998.6562735568" calcext:value-type="float">
            <text:p>54,998.66</text:p>
          </table:table-cell>
          <table:table-cell table:style-name="ce394" table:formula="of:=SUM([.D71:.D82])" office:value-type="float" office:value="35347.044744981" calcext:value-type="float">
            <text:p>35,347.04</text:p>
          </table:table-cell>
          <table:table-cell table:style-name="ce394" table:formula="of:=SUM([.E71:.E82])" office:value-type="float" office:value="19651.6115285758" calcext:value-type="float">
            <text:p>19,651.61</text:p>
          </table:table-cell>
          <table:table-cell table:style-name="ce394" table:formula="of:=+[.F82]" office:value-type="float" office:value="181454.424485949" calcext:value-type="float">
            <text:p>181,454.42</text:p>
          </table:table-cell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73" calcext:value-type="float">
            <text:p>73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83]-[.E83]" office:value-type="float" office:value="3103.99207398143" calcext:value-type="float">
            <text:p>3103.99</text:p>
          </table:table-cell>
          <table:table-cell table:style-name="ce392" table:formula="of:=+[.$C$3]*[.F82]" office:value-type="float" office:value="1479.2292821483" calcext:value-type="float">
            <text:p>1479.23</text:p>
          </table:table-cell>
          <table:table-cell table:style-name="ce392" table:formula="of:=+[.F82]-[.D83]" office:value-type="float" office:value="178350.432411968" calcext:value-type="float">
            <text:p>178350.43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74" calcext:value-type="float">
            <text:p>74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84]-[.E84]" office:value-type="float" office:value="3129.29603656265" calcext:value-type="float">
            <text:p>3129.30</text:p>
          </table:table-cell>
          <table:table-cell table:style-name="ce392" table:formula="of:=+[.$C$3]*[.F83]" office:value-type="float" office:value="1453.92531956708" calcext:value-type="float">
            <text:p>1453.93</text:p>
          </table:table-cell>
          <table:table-cell table:style-name="ce392" table:formula="of:=+[.F83]-[.D84]" office:value-type="float" office:value="175221.136375405" calcext:value-type="float">
            <text:p>175221.14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75" calcext:value-type="float">
            <text:p>75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85]-[.E85]" office:value-type="float" office:value="3154.80627883372" calcext:value-type="float">
            <text:p>3154.81</text:p>
          </table:table-cell>
          <table:table-cell table:style-name="ce392" table:formula="of:=+[.$C$3]*[.F84]" office:value-type="float" office:value="1428.41507729601" calcext:value-type="float">
            <text:p>1428.42</text:p>
          </table:table-cell>
          <table:table-cell table:style-name="ce392" table:formula="of:=+[.F84]-[.D85]" office:value-type="float" office:value="172066.330096571" calcext:value-type="float">
            <text:p>172066.33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76" calcext:value-type="float">
            <text:p>76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86]-[.E86]" office:value-type="float" office:value="3180.52448240124" calcext:value-type="float">
            <text:p>3180.52</text:p>
          </table:table-cell>
          <table:table-cell table:style-name="ce392" table:formula="of:=+[.$C$3]*[.F85]" office:value-type="float" office:value="1402.69687372849" calcext:value-type="float">
            <text:p>1402.70</text:p>
          </table:table-cell>
          <table:table-cell table:style-name="ce392" table:formula="of:=+[.F85]-[.D86]" office:value-type="float" office:value="168885.80561417" calcext:value-type="float">
            <text:p>168885.81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77" calcext:value-type="float">
            <text:p>77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87]-[.E87]" office:value-type="float" office:value="3206.45234258038" calcext:value-type="float">
            <text:p>3206.45</text:p>
          </table:table-cell>
          <table:table-cell table:style-name="ce392" table:formula="of:=+[.$C$3]*[.F86]" office:value-type="float" office:value="1376.76901354936" calcext:value-type="float">
            <text:p>1376.77</text:p>
          </table:table-cell>
          <table:table-cell table:style-name="ce392" table:formula="of:=+[.F86]-[.D87]" office:value-type="float" office:value="165679.35327159" calcext:value-type="float">
            <text:p>165679.35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78" calcext:value-type="float">
            <text:p>78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88]-[.E88]" office:value-type="float" office:value="3232.59156850664" calcext:value-type="float">
            <text:p>3232.59</text:p>
          </table:table-cell>
          <table:table-cell table:style-name="ce392" table:formula="of:=+[.$C$3]*[.F87]" office:value-type="float" office:value="1350.62978762309" calcext:value-type="float">
            <text:p>1350.63</text:p>
          </table:table-cell>
          <table:table-cell table:style-name="ce392" table:formula="of:=+[.F87]-[.D88]" office:value-type="float" office:value="162446.761703083" calcext:value-type="float">
            <text:p>162446.76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79" calcext:value-type="float">
            <text:p>79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89]-[.E89]" office:value-type="float" office:value="3258.94388324852" calcext:value-type="float">
            <text:p>3258.94</text:p>
          </table:table-cell>
          <table:table-cell table:style-name="ce392" table:formula="of:=+[.$C$3]*[.F88]" office:value-type="float" office:value="1324.27747288121" calcext:value-type="float">
            <text:p>1324.28</text:p>
          </table:table-cell>
          <table:table-cell table:style-name="ce392" table:formula="of:=+[.F88]-[.D89]" office:value-type="float" office:value="159187.817819835" calcext:value-type="float">
            <text:p>159187.82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80" calcext:value-type="float">
            <text:p>80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90]-[.E90]" office:value-type="float" office:value="3285.51102392109" calcext:value-type="float">
            <text:p>3285.51</text:p>
          </table:table-cell>
          <table:table-cell table:style-name="ce392" table:formula="of:=+[.$C$3]*[.F89]" office:value-type="float" office:value="1297.71033220864" calcext:value-type="float">
            <text:p>1297.71</text:p>
          </table:table-cell>
          <table:table-cell table:style-name="ce392" table:formula="of:=+[.F89]-[.D90]" office:value-type="float" office:value="155902.306795913" calcext:value-type="float">
            <text:p>155902.31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81" calcext:value-type="float">
            <text:p>81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91]-[.E91]" office:value-type="float" office:value="3312.29474180052" calcext:value-type="float">
            <text:p>3312.29</text:p>
          </table:table-cell>
          <table:table-cell table:style-name="ce392" table:formula="of:=+[.$C$3]*[.F90]" office:value-type="float" office:value="1270.92661432921" calcext:value-type="float">
            <text:p>1270.93</text:p>
          </table:table-cell>
          <table:table-cell table:style-name="ce392" table:formula="of:=+[.F90]-[.D91]" office:value-type="float" office:value="152590.012054113" calcext:value-type="float">
            <text:p>152590.01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82" calcext:value-type="float">
            <text:p>82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92]-[.E92]" office:value-type="float" office:value="3339.29680243948" calcext:value-type="float">
            <text:p>3339.30</text:p>
          </table:table-cell>
          <table:table-cell table:style-name="ce392" table:formula="of:=+[.$C$3]*[.F91]" office:value-type="float" office:value="1243.92455369025" calcext:value-type="float">
            <text:p>1243.92</text:p>
          </table:table-cell>
          <table:table-cell table:style-name="ce392" table:formula="of:=+[.F91]-[.D92]" office:value-type="float" office:value="149250.715251673" calcext:value-type="float">
            <text:p>149250.72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83" calcext:value-type="float">
            <text:p>83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93]-[.E93]" office:value-type="float" office:value="3366.51898578357" calcext:value-type="float">
            <text:p>3366.52</text:p>
          </table:table-cell>
          <table:table-cell table:style-name="ce392" table:formula="of:=+[.$C$3]*[.F92]" office:value-type="float" office:value="1216.70237034616" calcext:value-type="float">
            <text:p>1216.70</text:p>
          </table:table-cell>
          <table:table-cell table:style-name="ce392" table:formula="of:=+[.F92]-[.D93]" office:value-type="float" office:value="145884.19626589" calcext:value-type="float">
            <text:p>145884.20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>
          <table:table-cell/>
          <table:table-cell table:style-name="ce387" office:value-type="float" office:value="84" calcext:value-type="float">
            <text:p>84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94]-[.E94]" office:value-type="float" office:value="3393.96308628862" calcext:value-type="float">
            <text:p>3393.96</text:p>
          </table:table-cell>
          <table:table-cell table:style-name="ce392" table:formula="of:=+[.$C$3]*[.F93]" office:value-type="float" office:value="1189.25826984111" calcext:value-type="float">
            <text:p>1189.26</text:p>
          </table:table-cell>
          <table:table-cell table:style-name="ce392" table:formula="of:=+[.F93]-[.D94]" office:value-type="float" office:value="142490.233179601" calcext:value-type="float">
            <text:p>142490.23</text:p>
          </table:table-cell>
          <table:table-cell table:style-name="ce391"/>
          <table:table-cell table:style-name="ce394" table:formula="of:=SUM([.C83:.C94])" office:value-type="float" office:value="54998.6562735568" calcext:value-type="float">
            <text:p>54,998.66</text:p>
          </table:table-cell>
          <table:table-cell table:style-name="ce394" table:formula="of:=SUM([.D83:.D94])" office:value-type="float" office:value="38964.1913063479" calcext:value-type="float">
            <text:p>38,964.19</text:p>
          </table:table-cell>
          <table:table-cell table:style-name="ce394" table:formula="of:=SUM([.E83:.E94])" office:value-type="float" office:value="16034.4649672089" calcext:value-type="float">
            <text:p>16,034.46</text:p>
          </table:table-cell>
          <table:table-cell table:style-name="ce394" table:formula="of:=+[.F94]" office:value-type="float" office:value="142490.233179601" calcext:value-type="float">
            <text:p>142,490.23</text:p>
          </table:table-cell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85" calcext:value-type="float">
            <text:p>85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95]-[.E95]" office:value-type="float" office:value="3421.63091303901" calcext:value-type="float">
            <text:p>3421.63</text:p>
          </table:table-cell>
          <table:table-cell table:style-name="ce392" table:formula="of:=+[.$C$3]*[.F94]" office:value-type="float" office:value="1161.59044309072" calcext:value-type="float">
            <text:p>1161.59</text:p>
          </table:table-cell>
          <table:table-cell table:style-name="ce392" table:formula="of:=+[.F94]-[.D95]" office:value-type="float" office:value="139068.602266562" calcext:value-type="float">
            <text:p>139068.60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86" calcext:value-type="float">
            <text:p>86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96]-[.E96]" office:value-type="float" office:value="3449.52428986688" calcext:value-type="float">
            <text:p>3449.52</text:p>
          </table:table-cell>
          <table:table-cell table:style-name="ce392" table:formula="of:=+[.$C$3]*[.F95]" office:value-type="float" office:value="1133.69706626285" calcext:value-type="float">
            <text:p>1133.70</text:p>
          </table:table-cell>
          <table:table-cell table:style-name="ce392" table:formula="of:=+[.F95]-[.D96]" office:value-type="float" office:value="135619.077976695" calcext:value-type="float">
            <text:p>135619.08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87" calcext:value-type="float">
            <text:p>87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97]-[.E97]" office:value-type="float" office:value="3477.6450554724" calcext:value-type="float">
            <text:p>3477.65</text:p>
          </table:table-cell>
          <table:table-cell table:style-name="ce392" table:formula="of:=+[.$C$3]*[.F96]" office:value-type="float" office:value="1105.57630065734" calcext:value-type="float">
            <text:p>1105.58</text:p>
          </table:table-cell>
          <table:table-cell table:style-name="ce392" table:formula="of:=+[.F96]-[.D97]" office:value-type="float" office:value="132141.432921223" calcext:value-type="float">
            <text:p>132141.43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88" calcext:value-type="float">
            <text:p>88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98]-[.E98]" office:value-type="float" office:value="3505.99506354493" calcext:value-type="float">
            <text:p>3506.00</text:p>
          </table:table-cell>
          <table:table-cell table:style-name="ce392" table:formula="of:=+[.$C$3]*[.F97]" office:value-type="float" office:value="1077.22629258481" calcext:value-type="float">
            <text:p>1077.23</text:p>
          </table:table-cell>
          <table:table-cell table:style-name="ce392" table:formula="of:=+[.F97]-[.D98]" office:value-type="float" office:value="128635.437857678" calcext:value-type="float">
            <text:p>128635.44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89" calcext:value-type="float">
            <text:p>89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99]-[.E99]" office:value-type="float" office:value="3534.57618288525" calcext:value-type="float">
            <text:p>3534.58</text:p>
          </table:table-cell>
          <table:table-cell table:style-name="ce392" table:formula="of:=+[.$C$3]*[.F98]" office:value-type="float" office:value="1048.64517324448" calcext:value-type="float">
            <text:p>1048.65</text:p>
          </table:table-cell>
          <table:table-cell table:style-name="ce392" table:formula="of:=+[.F98]-[.D99]" office:value-type="float" office:value="125100.861674793" calcext:value-type="float">
            <text:p>125100.86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90" calcext:value-type="float">
            <text:p>90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100]-[.E100]" office:value-type="float" office:value="3563.39029752875" calcext:value-type="float">
            <text:p>3563.39</text:p>
          </table:table-cell>
          <table:table-cell table:style-name="ce392" table:formula="of:=+[.$C$3]*[.F99]" office:value-type="float" office:value="1019.83105860098" calcext:value-type="float">
            <text:p>1019.83</text:p>
          </table:table-cell>
          <table:table-cell table:style-name="ce392" table:formula="of:=+[.F99]-[.D100]" office:value-type="float" office:value="121537.471377264" calcext:value-type="float">
            <text:p>121537.47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91" calcext:value-type="float">
            <text:p>91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101]-[.E101]" office:value-type="float" office:value="3592.43930686958" calcext:value-type="float">
            <text:p>3592.44</text:p>
          </table:table-cell>
          <table:table-cell table:style-name="ce392" table:formula="of:=+[.$C$3]*[.F100]" office:value-type="float" office:value="990.78204926015" calcext:value-type="float">
            <text:p>990.78</text:p>
          </table:table-cell>
          <table:table-cell table:style-name="ce392" table:formula="of:=+[.F100]-[.D101]" office:value-type="float" office:value="117945.032070394" calcext:value-type="float">
            <text:p>117945.03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92" calcext:value-type="float">
            <text:p>92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102]-[.E102]" office:value-type="float" office:value="3621.72512578591" calcext:value-type="float">
            <text:p>3621.73</text:p>
          </table:table-cell>
          <table:table-cell table:style-name="ce392" table:formula="of:=+[.$C$3]*[.F101]" office:value-type="float" office:value="961.496230343822" calcext:value-type="float">
            <text:p>961.50</text:p>
          </table:table-cell>
          <table:table-cell table:style-name="ce392" table:formula="of:=+[.F101]-[.D102]" office:value-type="float" office:value="114323.306944609" calcext:value-type="float">
            <text:p>114323.31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93" calcext:value-type="float">
            <text:p>93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103]-[.E103]" office:value-type="float" office:value="3651.24968476612" calcext:value-type="float">
            <text:p>3651.25</text:p>
          </table:table-cell>
          <table:table-cell table:style-name="ce392" table:formula="of:=+[.$C$3]*[.F102]" office:value-type="float" office:value="931.971671363616" calcext:value-type="float">
            <text:p>931.97</text:p>
          </table:table-cell>
          <table:table-cell table:style-name="ce392" table:formula="of:=+[.F102]-[.D103]" office:value-type="float" office:value="110672.057259842" calcext:value-type="float">
            <text:p>110672.06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94" calcext:value-type="float">
            <text:p>94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104]-[.E104]" office:value-type="float" office:value="3681.01493003606" calcext:value-type="float">
            <text:p>3681.01</text:p>
          </table:table-cell>
          <table:table-cell table:style-name="ce392" table:formula="of:=+[.$C$3]*[.F103]" office:value-type="float" office:value="902.206426093673" calcext:value-type="float">
            <text:p>902.21</text:p>
          </table:table-cell>
          <table:table-cell table:style-name="ce392" table:formula="of:=+[.F103]-[.D104]" office:value-type="float" office:value="106991.042329806" calcext:value-type="float">
            <text:p>106991.04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95" calcext:value-type="float">
            <text:p>95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105]-[.E105]" office:value-type="float" office:value="3711.02282368737" calcext:value-type="float">
            <text:p>3711.02</text:p>
          </table:table-cell>
          <table:table-cell table:style-name="ce392" table:formula="of:=+[.$C$3]*[.F104]" office:value-type="float" office:value="872.19853244236" calcext:value-type="float">
            <text:p>872.20</text:p>
          </table:table-cell>
          <table:table-cell table:style-name="ce392" table:formula="of:=+[.F104]-[.D105]" office:value-type="float" office:value="103280.019506119" calcext:value-type="float">
            <text:p>103280.02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>
          <table:table-cell/>
          <table:table-cell table:style-name="ce387" office:value-type="float" office:value="96" calcext:value-type="float">
            <text:p>96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106]-[.E106]" office:value-type="float" office:value="3741.27534380679" calcext:value-type="float">
            <text:p>3741.28</text:p>
          </table:table-cell>
          <table:table-cell table:style-name="ce392" table:formula="of:=+[.$C$3]*[.F105]" office:value-type="float" office:value="841.94601232294" calcext:value-type="float">
            <text:p>841.95</text:p>
          </table:table-cell>
          <table:table-cell table:style-name="ce392" table:formula="of:=+[.F105]-[.D106]" office:value-type="float" office:value="99538.7441623122" calcext:value-type="float">
            <text:p>99538.74</text:p>
          </table:table-cell>
          <table:table-cell table:style-name="ce391"/>
          <table:table-cell table:style-name="ce394" table:formula="of:=SUM([.C95:.C106])" office:value-type="float" office:value="54998.6562735568" calcext:value-type="float">
            <text:p>54,998.66</text:p>
          </table:table-cell>
          <table:table-cell table:style-name="ce394" table:formula="of:=SUM([.D95:.D106])" office:value-type="float" office:value="42951.489017289" calcext:value-type="float">
            <text:p>42,951.49</text:p>
          </table:table-cell>
          <table:table-cell table:style-name="ce394" table:formula="of:=SUM([.E95:.E106])" office:value-type="float" office:value="12047.1672562677" calcext:value-type="float">
            <text:p>12,047.17</text:p>
          </table:table-cell>
          <table:table-cell table:style-name="ce394" table:formula="of:=+[.F106]" office:value-type="float" office:value="99538.7441623122" calcext:value-type="float">
            <text:p>99,538.74</text:p>
          </table:table-cell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97" calcext:value-type="float">
            <text:p>97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107]-[.E107]" office:value-type="float" office:value="3771.77448460656" calcext:value-type="float">
            <text:p>3771.77</text:p>
          </table:table-cell>
          <table:table-cell table:style-name="ce392" table:formula="of:=+[.$C$3]*[.F106]" office:value-type="float" office:value="811.446871523169" calcext:value-type="float">
            <text:p>811.45</text:p>
          </table:table-cell>
          <table:table-cell table:style-name="ce392" table:formula="of:=+[.F106]-[.D107]" office:value-type="float" office:value="95766.9696777057" calcext:value-type="float">
            <text:p>95766.97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98" calcext:value-type="float">
            <text:p>98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108]-[.E108]" office:value-type="float" office:value="3802.52225655589" calcext:value-type="float">
            <text:p>3802.52</text:p>
          </table:table-cell>
          <table:table-cell table:style-name="ce392" table:formula="of:=+[.$C$3]*[.F107]" office:value-type="float" office:value="780.699099573844" calcext:value-type="float">
            <text:p>780.70</text:p>
          </table:table-cell>
          <table:table-cell table:style-name="ce392" table:formula="of:=+[.F107]-[.D108]" office:value-type="float" office:value="91964.4474211498" calcext:value-type="float">
            <text:p>91964.45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99" calcext:value-type="float">
            <text:p>99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109]-[.E109]" office:value-type="float" office:value="3833.52068651345" calcext:value-type="float">
            <text:p>3833.52</text:p>
          </table:table-cell>
          <table:table-cell table:style-name="ce392" table:formula="of:=+[.$C$3]*[.F108]" office:value-type="float" office:value="749.700669616279" calcext:value-type="float">
            <text:p>749.70</text:p>
          </table:table-cell>
          <table:table-cell table:style-name="ce392" table:formula="of:=+[.F108]-[.D109]" office:value-type="float" office:value="88130.9267346363" calcext:value-type="float">
            <text:p>88130.93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100" calcext:value-type="float">
            <text:p>100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110]-[.E110]" office:value-type="float" office:value="3864.77181786104" calcext:value-type="float">
            <text:p>3864.77</text:p>
          </table:table-cell>
          <table:table-cell table:style-name="ce392" table:formula="of:=+[.$C$3]*[.F109]" office:value-type="float" office:value="718.449538268687" calcext:value-type="float">
            <text:p>718.45</text:p>
          </table:table-cell>
          <table:table-cell table:style-name="ce392" table:formula="of:=+[.F109]-[.D110]" office:value-type="float" office:value="84266.1549167753" calcext:value-type="float">
            <text:p>84266.15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101" calcext:value-type="float">
            <text:p>101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111]-[.E111]" office:value-type="float" office:value="3896.27771063824" calcext:value-type="float">
            <text:p>3896.28</text:p>
          </table:table-cell>
          <table:table-cell table:style-name="ce392" table:formula="of:=+[.$C$3]*[.F110]" office:value-type="float" office:value="686.943645491495" calcext:value-type="float">
            <text:p>686.94</text:p>
          </table:table-cell>
          <table:table-cell table:style-name="ce392" table:formula="of:=+[.F110]-[.D111]" office:value-type="float" office:value="80369.8772061371" calcext:value-type="float">
            <text:p>80369.88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102" calcext:value-type="float">
            <text:p>102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112]-[.E112]" office:value-type="float" office:value="3928.0404416782" calcext:value-type="float">
            <text:p>3928.04</text:p>
          </table:table-cell>
          <table:table-cell table:style-name="ce392" table:formula="of:=+[.$C$3]*[.F111]" office:value-type="float" office:value="655.180914451535" calcext:value-type="float">
            <text:p>655.18</text:p>
          </table:table-cell>
          <table:table-cell table:style-name="ce392" table:formula="of:=+[.F111]-[.D112]" office:value-type="float" office:value="76441.8367644589" calcext:value-type="float">
            <text:p>76441.84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103" calcext:value-type="float">
            <text:p>103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113]-[.E113]" office:value-type="float" office:value="3960.06210474458" calcext:value-type="float">
            <text:p>3960.06</text:p>
          </table:table-cell>
          <table:table-cell table:style-name="ce392" table:formula="of:=+[.$C$3]*[.F112]" office:value-type="float" office:value="623.159251385154" calcext:value-type="float">
            <text:p>623.16</text:p>
          </table:table-cell>
          <table:table-cell table:style-name="ce392" table:formula="of:=+[.F112]-[.D113]" office:value-type="float" office:value="72481.7746597143" calcext:value-type="float">
            <text:p>72481.77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104" calcext:value-type="float">
            <text:p>104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114]-[.E114]" office:value-type="float" office:value="3992.34481066954" calcext:value-type="float">
            <text:p>3992.34</text:p>
          </table:table-cell>
          <table:table-cell table:style-name="ce392" table:formula="of:=+[.$C$3]*[.F113]" office:value-type="float" office:value="590.876545460187" calcext:value-type="float">
            <text:p>590.88</text:p>
          </table:table-cell>
          <table:table-cell table:style-name="ce392" table:formula="of:=+[.F113]-[.D114]" office:value-type="float" office:value="68489.4298490447" calcext:value-type="float">
            <text:p>68489.43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105" calcext:value-type="float">
            <text:p>105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115]-[.E115]" office:value-type="float" office:value="4024.89068749291" calcext:value-type="float">
            <text:p>4024.89</text:p>
          </table:table-cell>
          <table:table-cell table:style-name="ce392" table:formula="of:=+[.$C$3]*[.F114]" office:value-type="float" office:value="558.330668636817" calcext:value-type="float">
            <text:p>558.33</text:p>
          </table:table-cell>
          <table:table-cell table:style-name="ce392" table:formula="of:=+[.F114]-[.D115]" office:value-type="float" office:value="64464.5391615518" calcext:value-type="float">
            <text:p>64464.54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106" calcext:value-type="float">
            <text:p>106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116]-[.E116]" office:value-type="float" office:value="4057.70188060244" calcext:value-type="float">
            <text:p>4057.70</text:p>
          </table:table-cell>
          <table:table-cell table:style-name="ce392" table:formula="of:=+[.$C$3]*[.F115]" office:value-type="float" office:value="525.519475527296" calcext:value-type="float">
            <text:p>525.52</text:p>
          </table:table-cell>
          <table:table-cell table:style-name="ce392" table:formula="of:=+[.F115]-[.D116]" office:value-type="float" office:value="60406.8372809494" calcext:value-type="float">
            <text:p>60406.84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107" calcext:value-type="float">
            <text:p>107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117]-[.E117]" office:value-type="float" office:value="4090.78055287521" calcext:value-type="float">
            <text:p>4090.78</text:p>
          </table:table-cell>
          <table:table-cell table:style-name="ce392" table:formula="of:=+[.$C$3]*[.F116]" office:value-type="float" office:value="492.440803254523" calcext:value-type="float">
            <text:p>492.44</text:p>
          </table:table-cell>
          <table:table-cell table:style-name="ce392" table:formula="of:=+[.F116]-[.D117]" office:value-type="float" office:value="56316.0567280742" calcext:value-type="float">
            <text:p>56316.06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>
          <table:table-cell/>
          <table:table-cell table:style-name="ce387" office:value-type="float" office:value="108" calcext:value-type="float">
            <text:p>108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118]-[.E118]" office:value-type="float" office:value="4124.12888482026" calcext:value-type="float">
            <text:p>4124.13</text:p>
          </table:table-cell>
          <table:table-cell table:style-name="ce392" table:formula="of:=+[.$C$3]*[.F117]" office:value-type="float" office:value="459.092471309471" calcext:value-type="float">
            <text:p>459.09</text:p>
          </table:table-cell>
          <table:table-cell table:style-name="ce392" table:formula="of:=+[.F117]-[.D118]" office:value-type="float" office:value="52191.9278432539" calcext:value-type="float">
            <text:p>52191.93</text:p>
          </table:table-cell>
          <table:table-cell table:style-name="ce391"/>
          <table:table-cell table:style-name="ce394" table:formula="of:=SUM([.C107:.C118])" office:value-type="float" office:value="54998.6562735568" calcext:value-type="float">
            <text:p>54,998.66</text:p>
          </table:table-cell>
          <table:table-cell table:style-name="ce394" table:formula="of:=SUM([.D107:.D118])" office:value-type="float" office:value="47346.8163190583" calcext:value-type="float">
            <text:p>47,346.82</text:p>
          </table:table-cell>
          <table:table-cell table:style-name="ce394" table:formula="of:=SUM([.E107:.E118])" office:value-type="float" office:value="7651.83995449846" calcext:value-type="float">
            <text:p>7,651.84</text:p>
          </table:table-cell>
          <table:table-cell table:style-name="ce394" table:formula="of:=+[.F118]" office:value-type="float" office:value="52191.9278432539" calcext:value-type="float">
            <text:p>52,191.93</text:p>
          </table:table-cell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109" calcext:value-type="float">
            <text:p>109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119]-[.E119]" office:value-type="float" office:value="4157.74907472228" calcext:value-type="float">
            <text:p>4157.75</text:p>
          </table:table-cell>
          <table:table-cell table:style-name="ce392" table:formula="of:=+[.$C$3]*[.F118]" office:value-type="float" office:value="425.472281407449" calcext:value-type="float">
            <text:p>425.47</text:p>
          </table:table-cell>
          <table:table-cell table:style-name="ce392" table:formula="of:=+[.F118]-[.D119]" office:value-type="float" office:value="48034.1787685316" calcext:value-type="float">
            <text:p>48034.18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110" calcext:value-type="float">
            <text:p>110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120]-[.E120]" office:value-type="float" office:value="4191.64333878654" calcext:value-type="float">
            <text:p>4191.64</text:p>
          </table:table-cell>
          <table:table-cell table:style-name="ce392" table:formula="of:=+[.$C$3]*[.F119]" office:value-type="float" office:value="391.578017343194" calcext:value-type="float">
            <text:p>391.58</text:p>
          </table:table-cell>
          <table:table-cell table:style-name="ce392" table:formula="of:=+[.F119]-[.D120]" office:value-type="float" office:value="43842.5354297451" calcext:value-type="float">
            <text:p>43842.54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111" calcext:value-type="float">
            <text:p>111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121]-[.E121]" office:value-type="float" office:value="4225.81391128495" calcext:value-type="float">
            <text:p>4225.81</text:p>
          </table:table-cell>
          <table:table-cell table:style-name="ce392" table:formula="of:=+[.$C$3]*[.F120]" office:value-type="float" office:value="357.407444844781" calcext:value-type="float">
            <text:p>357.41</text:p>
          </table:table-cell>
          <table:table-cell table:style-name="ce392" table:formula="of:=+[.F120]-[.D121]" office:value-type="float" office:value="39616.7215184601" calcext:value-type="float">
            <text:p>39616.72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112" calcext:value-type="float">
            <text:p>112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122]-[.E122]" office:value-type="float" office:value="4260.26304470339" calcext:value-type="float">
            <text:p>4260.26</text:p>
          </table:table-cell>
          <table:table-cell table:style-name="ce392" table:formula="of:=+[.$C$3]*[.F121]" office:value-type="float" office:value="322.958311426343" calcext:value-type="float">
            <text:p>322.96</text:p>
          </table:table-cell>
          <table:table-cell table:style-name="ce392" table:formula="of:=+[.F121]-[.D122]" office:value-type="float" office:value="35356.4584737568" calcext:value-type="float">
            <text:p>35356.46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113" calcext:value-type="float">
            <text:p>113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123]-[.E123]" office:value-type="float" office:value="4294.99300989014" calcext:value-type="float">
            <text:p>4294.99</text:p>
          </table:table-cell>
          <table:table-cell table:style-name="ce392" table:formula="of:=+[.$C$3]*[.F122]" office:value-type="float" office:value="288.228346239588" calcext:value-type="float">
            <text:p>288.23</text:p>
          </table:table-cell>
          <table:table-cell table:style-name="ce392" table:formula="of:=+[.F122]-[.D123]" office:value-type="float" office:value="31061.4654638666" calcext:value-type="float">
            <text:p>31061.47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114" calcext:value-type="float">
            <text:p>114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124]-[.E124]" office:value-type="float" office:value="4330.00609620562" calcext:value-type="float">
            <text:p>4330.01</text:p>
          </table:table-cell>
          <table:table-cell table:style-name="ce392" table:formula="of:=+[.$C$3]*[.F123]" office:value-type="float" office:value="253.215259924111" calcext:value-type="float">
            <text:p>253.22</text:p>
          </table:table-cell>
          <table:table-cell table:style-name="ce392" table:formula="of:=+[.F123]-[.D124]" office:value-type="float" office:value="26731.459367661" calcext:value-type="float">
            <text:p>26731.46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115" calcext:value-type="float">
            <text:p>115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125]-[.E125]" office:value-type="float" office:value="4365.30461167326" calcext:value-type="float">
            <text:p>4365.30</text:p>
          </table:table-cell>
          <table:table-cell table:style-name="ce392" table:formula="of:=+[.$C$3]*[.F124]" office:value-type="float" office:value="217.916744456477" calcext:value-type="float">
            <text:p>217.92</text:p>
          </table:table-cell>
          <table:table-cell table:style-name="ce392" table:formula="of:=+[.F124]-[.D125]" office:value-type="float" office:value="22366.1547559877" calcext:value-type="float">
            <text:p>22366.15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116" calcext:value-type="float">
            <text:p>116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126]-[.E126]" office:value-type="float" office:value="4400.89088313165" calcext:value-type="float">
            <text:p>4400.89</text:p>
          </table:table-cell>
          <table:table-cell table:style-name="ce392" table:formula="of:=+[.$C$3]*[.F125]" office:value-type="float" office:value="182.33047299808" calcext:value-type="float">
            <text:p>182.33</text:p>
          </table:table-cell>
          <table:table-cell table:style-name="ce392" table:formula="of:=+[.F125]-[.D126]" office:value-type="float" office:value="17965.2638728561" calcext:value-type="float">
            <text:p>17965.26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117" calcext:value-type="float">
            <text:p>117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127]-[.E127]" office:value-type="float" office:value="4436.76725638797" calcext:value-type="float">
            <text:p>4436.77</text:p>
          </table:table-cell>
          <table:table-cell table:style-name="ce392" table:formula="of:=+[.$C$3]*[.F126]" office:value-type="float" office:value="146.454099741765" calcext:value-type="float">
            <text:p>146.45</text:p>
          </table:table-cell>
          <table:table-cell table:style-name="ce392" table:formula="of:=+[.F126]-[.D127]" office:value-type="float" office:value="13528.4966164681" calcext:value-type="float">
            <text:p>13528.50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118" calcext:value-type="float">
            <text:p>118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128]-[.E128]" office:value-type="float" office:value="4472.93609637254" calcext:value-type="float">
            <text:p>4472.94</text:p>
          </table:table-cell>
          <table:table-cell table:style-name="ce392" table:formula="of:=+[.$C$3]*[.F127]" office:value-type="float" office:value="110.285259757187" calcext:value-type="float">
            <text:p>110.29</text:p>
          </table:table-cell>
          <table:table-cell table:style-name="ce392" table:formula="of:=+[.F127]-[.D128]" office:value-type="float" office:value="9055.56052009558" calcext:value-type="float">
            <text:p>9055.56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 table:visibility="collapse">
          <table:table-cell/>
          <table:table-cell table:style-name="ce387" office:value-type="float" office:value="119" calcext:value-type="float">
            <text:p>119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129]-[.E129]" office:value-type="float" office:value="4509.39978729481" calcext:value-type="float">
            <text:p>4509.40</text:p>
          </table:table-cell>
          <table:table-cell table:style-name="ce392" table:formula="of:=+[.$C$3]*[.F128]" office:value-type="float" office:value="73.8215688349265" calcext:value-type="float">
            <text:p>73.82</text:p>
          </table:table-cell>
          <table:table-cell table:style-name="ce392" table:formula="of:=+[.F128]-[.D129]" office:value-type="float" office:value="4546.16073280077" calcext:value-type="float">
            <text:p>4546.16</text:p>
          </table:table-cell>
          <table:table-cell table:style-name="ce391"/>
          <table:table-cell table:style-name="ce394" table:number-columns-repeated="4"/>
          <table:table-cell table:number-columns-repeated="16373"/>
        </table:table-row>
        <table:table-row table:style-name="ro13">
          <table:table-cell/>
          <table:table-cell table:style-name="ce387" office:value-type="float" office:value="120" calcext:value-type="float">
            <text:p>120</text:p>
          </table:table-cell>
          <table:table-cell table:style-name="ce392" table:formula="of:=+[.$C$6]" office:value-type="float" office:value="4583.22135612973" calcext:value-type="float">
            <text:p>4583.22</text:p>
          </table:table-cell>
          <table:table-cell table:style-name="ce392" table:formula="of:=+[.C130]-[.E130]" office:value-type="float" office:value="4546.16073280042" calcext:value-type="float">
            <text:p>4546.16</text:p>
          </table:table-cell>
          <table:table-cell table:style-name="ce392" table:formula="of:=+[.$C$3]*[.F129]" office:value-type="float" office:value="37.0606233293166" calcext:value-type="float">
            <text:p>37.06</text:p>
          </table:table-cell>
          <table:table-cell table:style-name="ce392" table:formula="of:=+[.F129]-[.D130]" office:value-type="float" office:value="0.000000000356521923094988" calcext:value-type="float">
            <text:p>0.00</text:p>
          </table:table-cell>
          <table:table-cell table:style-name="ce391"/>
          <table:table-cell table:style-name="ce394" table:formula="of:=SUM([.C119:.C130])" office:value-type="float" office:value="54998.6562735568" calcext:value-type="float">
            <text:p>54,998.66</text:p>
          </table:table-cell>
          <table:table-cell table:style-name="ce394" table:formula="of:=SUM([.D119:.D130])" office:value-type="float" office:value="52191.9278432536" calcext:value-type="float">
            <text:p>52,191.93</text:p>
          </table:table-cell>
          <table:table-cell table:style-name="ce394" table:formula="of:=SUM([.E119:.E130])" office:value-type="float" office:value="2806.72843030322" calcext:value-type="float">
            <text:p>2,806.73</text:p>
          </table:table-cell>
          <table:table-cell table:style-name="ce394" table:formula="of:=+[.F130]" office:value-type="float" office:value="0.000000000356521923094988" calcext:value-type="float">
            <text:p>0.00</text:p>
          </table:table-cell>
          <table:table-cell table:number-columns-repeated="16373"/>
        </table:table-row>
        <table:table-row table:style-name="ro13">
          <table:table-cell/>
          <table:table-cell table:style-name="ce388"/>
          <table:table-cell table:style-name="ce392" table:formula="of:=SUM([.C11:.C130])" office:value-type="float" office:value="549986.562735568" calcext:value-type="float">
            <text:p>549986.56</text:p>
          </table:table-cell>
          <table:table-cell table:style-name="ce392" table:formula="of:=SUM([.D11:.D130])" office:value-type="float" office:value="350000" calcext:value-type="float">
            <text:p>350000.00</text:p>
          </table:table-cell>
          <table:table-cell table:style-name="ce392" table:formula="of:=SUM([.E11:.E130])" office:value-type="float" office:value="199986.562735568" calcext:value-type="float">
            <text:p>199986.56</text:p>
          </table:table-cell>
          <table:table-cell table:style-name="ce388"/>
          <table:table-cell table:style-name="ce391"/>
          <table:table-cell table:style-name="ce394" table:formula="of:=SUM([.H22:.H130])" office:value-type="float" office:value="549986.562735568" calcext:value-type="float">
            <text:p>549,986.56</text:p>
          </table:table-cell>
          <table:table-cell table:style-name="ce394" table:formula="of:=SUM([.I22:.I130])" office:value-type="float" office:value="350000" calcext:value-type="float">
            <text:p>350,000.00</text:p>
          </table:table-cell>
          <table:table-cell table:style-name="ce394" table:formula="of:=SUM([.J22:.J130])" office:value-type="float" office:value="199986.562735568" calcext:value-type="float">
            <text:p>199,986.56</text:p>
          </table:table-cell>
          <table:table-cell table:style-name="ce394"/>
          <table:table-cell table:number-columns-repeated="16373"/>
        </table:table-row>
        <table:table-row table:style-name="ro13" table:number-rows-repeated="3">
          <table:table-cell table:number-columns-repeated="16384"/>
        </table:table-row>
        <table:table-row table:style-name="ro13">
          <table:table-cell/>
          <table:table-cell table:style-name="ce386" office:value-type="string" calcext:value-type="string">
            <text:p>n</text:p>
          </table:table-cell>
          <table:table-cell table:style-name="ce386" office:value-type="float" office:value="0" calcext:value-type="float">
            <text:p>0</text:p>
          </table:table-cell>
          <table:table-cell table:style-name="ce386" office:value-type="float" office:value="1" calcext:value-type="float">
            <text:p>1</text:p>
          </table:table-cell>
          <table:table-cell table:style-name="ce386" office:value-type="float" office:value="2" calcext:value-type="float">
            <text:p>2</text:p>
          </table:table-cell>
          <table:table-cell table:style-name="ce386" office:value-type="float" office:value="3" calcext:value-type="float">
            <text:p>3</text:p>
          </table:table-cell>
          <table:table-cell table:style-name="ce398" office:value-type="float" office:value="4" calcext:value-type="float">
            <text:p>4</text:p>
          </table:table-cell>
          <table:table-cell table:style-name="ce386" office:value-type="float" office:value="5" calcext:value-type="float">
            <text:p>5</text:p>
          </table:table-cell>
          <table:table-cell table:style-name="ce386" office:value-type="float" office:value="6" calcext:value-type="float">
            <text:p>6</text:p>
          </table:table-cell>
          <table:table-cell table:style-name="ce386" office:value-type="float" office:value="7" calcext:value-type="float">
            <text:p>7</text:p>
          </table:table-cell>
          <table:table-cell table:style-name="ce386" office:value-type="float" office:value="8" calcext:value-type="float">
            <text:p>8</text:p>
          </table:table-cell>
          <table:table-cell table:style-name="ce403" office:value-type="float" office:value="9" calcext:value-type="float">
            <text:p>9</text:p>
          </table:table-cell>
          <table:table-cell table:style-name="ce386" office:value-type="float" office:value="10" calcext:value-type="float">
            <text:p>10</text:p>
          </table:table-cell>
          <table:table-cell table:number-columns-repeated="16371"/>
        </table:table-row>
        <table:table-row table:style-name="ro13">
          <table:table-cell/>
          <table:table-cell table:style-name="ce389" office:value-type="string" calcext:value-type="string">
            <text:p>cuota</text:p>
          </table:table-cell>
          <table:table-cell table:style-name="ce388"/>
          <table:table-cell table:style-name="ce392" table:formula="of:=+[.$H$22]" office:value-type="float" office:value="54998.6562735568" calcext:value-type="float">
            <text:p>54998.66</text:p>
          </table:table-cell>
          <table:table-cell table:style-name="ce392" table:formula="of:=+[.$H$22]" office:value-type="float" office:value="54998.6562735568" calcext:value-type="float">
            <text:p>54998.66</text:p>
          </table:table-cell>
          <table:table-cell table:style-name="ce392" table:formula="of:=+[.$H$22]" office:value-type="float" office:value="54998.6562735568" calcext:value-type="float">
            <text:p>54998.66</text:p>
          </table:table-cell>
          <table:table-cell table:style-name="ce399" table:formula="of:=+[.$H$22]" office:value-type="float" office:value="54998.6562735568" calcext:value-type="float">
            <text:p>54998.66</text:p>
          </table:table-cell>
          <table:table-cell table:style-name="ce392" table:formula="of:=+[.$H$22]" office:value-type="float" office:value="54998.6562735568" calcext:value-type="float">
            <text:p>54998.66</text:p>
          </table:table-cell>
          <table:table-cell table:style-name="ce392" table:formula="of:=+[.$H$22]" office:value-type="float" office:value="54998.6562735568" calcext:value-type="float">
            <text:p>54998.66</text:p>
          </table:table-cell>
          <table:table-cell table:style-name="ce392" table:formula="of:=+[.$H$22]" office:value-type="float" office:value="54998.6562735568" calcext:value-type="float">
            <text:p>54998.66</text:p>
          </table:table-cell>
          <table:table-cell table:style-name="ce392" table:formula="of:=+[.$H$22]" office:value-type="float" office:value="54998.6562735568" calcext:value-type="float">
            <text:p>54998.66</text:p>
          </table:table-cell>
          <table:table-cell table:style-name="ce404" table:formula="of:=+[.$H$22]" office:value-type="float" office:value="54998.6562735568" calcext:value-type="float">
            <text:p>54998.66</text:p>
          </table:table-cell>
          <table:table-cell table:style-name="ce392" table:formula="of:=+[.$H$22]" office:value-type="float" office:value="54998.6562735568" calcext:value-type="float">
            <text:p>54998.66</text:p>
          </table:table-cell>
          <table:table-cell table:number-columns-repeated="16371"/>
        </table:table-row>
        <table:table-row table:style-name="ro13">
          <table:table-cell/>
          <table:table-cell table:style-name="ce389" office:value-type="string" calcext:value-type="string">
            <text:p>capital</text:p>
          </table:table-cell>
          <table:table-cell table:style-name="ce388"/>
          <table:table-cell table:style-name="ce392" table:formula="of:=+[.I22]" office:value-type="float" office:value="21716.5245409156" calcext:value-type="float">
            <text:p>21716.52</text:p>
          </table:table-cell>
          <table:table-cell table:style-name="ce392" table:formula="of:=+[.I34]" office:value-type="float" office:value="23938.8277811085" calcext:value-type="float">
            <text:p>23938.83</text:p>
          </table:table-cell>
          <table:table-cell table:style-name="ce392" table:formula="of:=+[.I46]" office:value-type="float" office:value="26388.544559875" calcext:value-type="float">
            <text:p>26388.54</text:p>
          </table:table-cell>
          <table:table-cell table:style-name="ce399" table:formula="of:=+[.I58]" office:value-type="float" office:value="29088.9466416581" calcext:value-type="float">
            <text:p>29088.95</text:p>
          </table:table-cell>
          <table:table-cell table:style-name="ce392" table:formula="of:=+[.I70]" office:value-type="float" office:value="32065.687245513" calcext:value-type="float">
            <text:p>32065.69</text:p>
          </table:table-cell>
          <table:table-cell table:style-name="ce392" table:formula="of:=+[.I82]" office:value-type="float" office:value="35347.044744981" calcext:value-type="float">
            <text:p>35347.04</text:p>
          </table:table-cell>
          <table:table-cell table:style-name="ce392" table:formula="of:=+[.I94]" office:value-type="float" office:value="38964.1913063479" calcext:value-type="float">
            <text:p>38964.19</text:p>
          </table:table-cell>
          <table:table-cell table:style-name="ce392" table:formula="of:=+[.I106]" office:value-type="float" office:value="42951.489017289" calcext:value-type="float">
            <text:p>42951.49</text:p>
          </table:table-cell>
          <table:table-cell table:style-name="ce404" table:formula="of:=+[.I118]" office:value-type="float" office:value="47346.8163190583" calcext:value-type="float">
            <text:p>47346.82</text:p>
          </table:table-cell>
          <table:table-cell table:style-name="ce392" table:formula="of:=+[.I130]" office:value-type="float" office:value="52191.9278432536" calcext:value-type="float">
            <text:p>52191.93</text:p>
          </table:table-cell>
          <table:table-cell table:number-columns-repeated="16371"/>
        </table:table-row>
        <table:table-row table:style-name="ro13">
          <table:table-cell/>
          <table:table-cell table:style-name="ce389" office:value-type="string" calcext:value-type="string">
            <text:p>interés</text:p>
          </table:table-cell>
          <table:table-cell table:style-name="ce388"/>
          <table:table-cell table:style-name="ce392" table:formula="of:=+[.D136]-[.D137]" office:value-type="float" office:value="33282.1317326412" calcext:value-type="float">
            <text:p>33282.13</text:p>
          </table:table-cell>
          <table:table-cell table:style-name="ce392" table:formula="of:=+[.E136]-[.E137]" office:value-type="float" office:value="31059.8284924483" calcext:value-type="float">
            <text:p>31059.83</text:p>
          </table:table-cell>
          <table:table-cell table:style-name="ce392" table:formula="of:=+[.F136]-[.F137]" office:value-type="float" office:value="28610.1117136818" calcext:value-type="float">
            <text:p>28610.11</text:p>
          </table:table-cell>
          <table:table-cell table:style-name="ce399" table:formula="of:=+[.G136]-[.G137]" office:value-type="float" office:value="25909.7096318986" calcext:value-type="float">
            <text:p>25909.71</text:p>
          </table:table-cell>
          <table:table-cell table:style-name="ce392" table:formula="of:=+[.H136]-[.H137]" office:value-type="float" office:value="22932.9690280438" calcext:value-type="float">
            <text:p>22932.97</text:p>
          </table:table-cell>
          <table:table-cell table:style-name="ce392" table:formula="of:=+[.I136]-[.I137]" office:value-type="float" office:value="19651.6115285758" calcext:value-type="float">
            <text:p>19651.61</text:p>
          </table:table-cell>
          <table:table-cell table:style-name="ce392" table:formula="of:=+[.J136]-[.J137]" office:value-type="float" office:value="16034.4649672089" calcext:value-type="float">
            <text:p>16034.46</text:p>
          </table:table-cell>
          <table:table-cell table:style-name="ce392" table:formula="of:=+[.K136]-[.K137]" office:value-type="float" office:value="12047.1672562677" calcext:value-type="float">
            <text:p>12047.17</text:p>
          </table:table-cell>
          <table:table-cell table:style-name="ce404" table:formula="of:=+[.L136]-[.L137]" office:value-type="float" office:value="7651.83995449846" calcext:value-type="float">
            <text:p>7651.84</text:p>
          </table:table-cell>
          <table:table-cell table:style-name="ce392" table:formula="of:=+[.M136]-[.M137]" office:value-type="float" office:value="2806.72843030321" calcext:value-type="float">
            <text:p>2806.73</text:p>
          </table:table-cell>
          <table:table-cell table:number-columns-repeated="16371"/>
        </table:table-row>
        <table:table-row table:style-name="ro13">
          <table:table-cell/>
          <table:table-cell table:style-name="ce389" office:value-type="string" calcext:value-type="string">
            <text:p>saldo</text:p>
          </table:table-cell>
          <table:table-cell table:style-name="ce394" table:formula="of:=+[.K10]" office:value-type="float" office:value="350000" calcext:value-type="float">
            <text:p>350,000.00</text:p>
          </table:table-cell>
          <table:table-cell table:style-name="ce392" table:formula="of:=+[.C139]-[.D137]" office:value-type="float" office:value="328283.475459084" calcext:value-type="float">
            <text:p>328283.48</text:p>
          </table:table-cell>
          <table:table-cell table:style-name="ce392" table:formula="of:=+[.D139]-[.E137]" office:value-type="float" office:value="304344.647677976" calcext:value-type="float">
            <text:p>304344.65</text:p>
          </table:table-cell>
          <table:table-cell table:style-name="ce392" table:formula="of:=+[.E139]-[.F137]" office:value-type="float" office:value="277956.103118101" calcext:value-type="float">
            <text:p>277956.10</text:p>
          </table:table-cell>
          <table:table-cell table:style-name="ce399" table:formula="of:=+[.F139]-[.G137]" office:value-type="float" office:value="248867.156476443" calcext:value-type="float">
            <text:p>248867.16</text:p>
          </table:table-cell>
          <table:table-cell table:style-name="ce392" table:formula="of:=+[.G139]-[.H137]" office:value-type="float" office:value="216801.46923093" calcext:value-type="float">
            <text:p>216801.47</text:p>
          </table:table-cell>
          <table:table-cell table:style-name="ce392" table:formula="of:=+[.H139]-[.I137]" office:value-type="float" office:value="181454.424485949" calcext:value-type="float">
            <text:p>181454.42</text:p>
          </table:table-cell>
          <table:table-cell table:style-name="ce392" table:formula="of:=+[.I139]-[.J137]" office:value-type="float" office:value="142490.233179601" calcext:value-type="float">
            <text:p>142490.23</text:p>
          </table:table-cell>
          <table:table-cell table:style-name="ce392" table:formula="of:=+[.J139]-[.K137]" office:value-type="float" office:value="99538.744162312" calcext:value-type="float">
            <text:p>99538.74</text:p>
          </table:table-cell>
          <table:table-cell table:style-name="ce404" table:formula="of:=+[.K139]-[.L137]" office:value-type="float" office:value="52191.9278432537" calcext:value-type="float">
            <text:p>52191.93</text:p>
          </table:table-cell>
          <table:table-cell table:style-name="ce392" table:formula="of:=+[.L139]-[.M137]" office:value-type="float" office:value="0" calcext:value-type="float">
            <text:p>0.00</text:p>
          </table:table-cell>
          <table:table-cell table:number-columns-repeated="16371"/>
        </table:table-row>
        <table:table-row table:style-name="ro13" table:number-rows-repeated="1048436">
          <table:table-cell table:number-columns-repeated="16384"/>
        </table:table-row>
        <table:table-row table:style-name="ro13">
          <table:table-cell table:number-columns-repeated="16384"/>
        </table:table-row>
        <table:named-expressions>
          <table:named-expression table:name="Precio_Materia_Prima" table:base-cell-address="$'Resumen del escenario 2'.$A$1" table:expression="#REF!"/>
          <table:named-expression table:name="Precio_Queso_Maduro" table:base-cell-address="$'Resumen del escenario 2'.$A$1" table:expression="#REF!"/>
          <table:named-expression table:name="Precio_retablo_unidad" table:base-cell-address="$'Resumen del escenario 2'.$A$1" table:expression="#REF!"/>
          <table:named-expression table:name="TIRE" table:base-cell-address="$'Resumen del escenario 2'.$A$1" table:expression="#REF!"/>
          <table:named-expression table:name="TIRF" table:base-cell-address="$'Resumen del escenario 2'.$A$1" table:expression="#REF!"/>
          <table:named-expression table:name="VANE" table:base-cell-address="$'Resumen del escenario 2'.$A$1" table:expression="#REF!"/>
          <table:named-expression table:name="VANF" table:base-cell-address="$'Resumen del escenario 2'.$A$1" table:expression="#REF!"/>
        </table:named-expressions>
      </table:table>
      <table:table table:name="Ku" table:style-name="ta16">
        <table:table-column table:style-name="co4" table:default-cell-style-name="ce16"/>
        <table:table-column table:style-name="co45" table:default-cell-style-name="ce16"/>
        <table:table-column table:style-name="co4" table:number-columns-repeated="5" table:default-cell-style-name="ce16"/>
        <table:table-column table:style-name="co49" table:default-cell-style-name="ce16"/>
        <table:table-column table:style-name="co50" table:default-cell-style-name="ce16"/>
        <table:table-column table:style-name="co51" table:default-cell-style-name="ce16"/>
        <table:table-column table:style-name="co4" table:number-columns-repeated="16374" table:default-cell-style-name="ce16"/>
        <table:table-row table:style-name="ro1">
          <table:table-cell table:number-columns-repeated="16384"/>
        </table:table-row>
        <table:table-row table:style-name="ro1">
          <table:table-cell/>
          <table:table-cell table:style-name="ce405" office:value-type="string" calcext:value-type="string">
            <text:p><text:a xlink:href="http://www.damodaran.com/" xlink:type="simple">http://www.damodaran.com</text:a>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98" office:value-type="string" calcext:value-type="string" table:number-columns-spanned="5" table:number-rows-spanned="1">
            <text:p>Betas totales para mercados emergentes</text:p>
          </table:table-cell>
          <table:covered-table-cell table:number-columns-repeated="4" table:style-name="ce198"/>
          <table:table-cell/>
          <table:table-cell table:style-name="ce21" office:value-type="string" calcext:value-type="string">
            <text:p>Ku con riesgo total</text:p>
          </table:table-cell>
          <table:table-cell table:style-name="ce21"/>
          <table:table-cell table:number-columns-repeated="16375"/>
        </table:table-row>
        <table:table-row table:style-name="ro19">
          <table:table-cell/>
          <table:table-cell table:style-name="ce406" office:value-type="string" calcext:value-type="string" table:number-columns-spanned="3" table:number-rows-spanned="1">
            <text:p>Industria</text:p>
          </table:table-cell>
          <table:covered-table-cell table:number-columns-repeated="2" table:style-name="ce406"/>
          <table:table-cell table:style-name="ce408" office:value-type="string" calcext:value-type="string" table:number-columns-spanned="2" table:number-rows-spanned="1">
            <text:p>Beta total sin apalancamiento</text:p>
          </table:table-cell>
          <table:covered-table-cell table:style-name="ce408"/>
          <table:table-cell table:number-columns-repeated="16378"/>
        </table:table-row>
        <table:table-row table:style-name="ro1">
          <table:table-cell/>
          <table:table-cell table:style-name="ce23" office:value-type="string" calcext:value-type="string">
            <text:p>Distribución de petróleo / gas</text:p>
          </table:table-cell>
          <table:table-cell table:style-name="ce23" table:number-columns-repeated="2"/>
          <table:table-cell table:style-name="ce409" office:value-type="float" office:value="2.7" calcext:value-type="float" table:number-columns-spanned="2" table:number-rows-spanned="1">
            <text:p>2.7</text:p>
          </table:table-cell>
          <table:covered-table-cell table:style-name="ce409"/>
          <table:table-cell/>
          <table:table-cell>
            <draw:custom-shape draw:z-index="0" draw:name="CuadroTexto 1" draw:style-name="gr1" draw:text-style-name="P2" svg:width="9.007cm" svg:height="0.389cm" svg:x="0.857cm" svg:y="-0.848cm">
              <text:p text:style-name="P1"><text:span text:style-name="T1">𝐾𝑢𝑟𝑡</text:span><text:span text:style-name="T1">=𝑅𝑓𝑢𝑠𝑎+𝐵𝑢 𝑡𝑜𝑡𝑎𝑙 𝑀𝐸∗(𝑅𝑚−𝑅𝑓)𝑢𝑠𝑎+𝑅𝑝 𝑝𝑒𝑟ú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 table:visibility="collapse">
          <table:table-cell table:number-columns-repeated="2"/>
          <table:table-cell table:style-name="ce38"/>
          <table:table-cell table:number-columns-repeated="4"/>
          <table:table-cell office:value-type="string" calcext:value-type="string">
            <text:p>Rf USA</text:p>
          </table:table-cell>
          <table:table-cell table:style-name="ce410" office:value-type="string" calcext:value-type="string">
            <text:p>=</text:p>
          </table:table-cell>
          <table:table-cell table:style-name="ce412" table:formula="of:=+[.C9]" office:value-type="percentage" office:value="0.0494749023469268" calcext:value-type="percentage">
            <text:p>4.9%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Rf</text:p>
          </table:table-cell>
          <table:table-cell table:style-name="ce407" office:value-type="percentage" office:value="0.0494749023469268" calcext:value-type="percentage">
            <text:p>4.9%</text:p>
          </table:table-cell>
          <table:table-cell table:number-columns-repeated="4"/>
          <table:table-cell office:value-type="string" calcext:value-type="string">
            <text:p>Bu total ME</text:p>
          </table:table-cell>
          <table:table-cell table:style-name="ce410" office:value-type="string" calcext:value-type="string">
            <text:p>=</text:p>
          </table:table-cell>
          <table:table-cell table:style-name="ce413" table:formula="of:=+[.E6]" office:value-type="float" office:value="2.7" calcext:value-type="float">
            <text:p>2.7000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Rm</text:p>
          </table:table-cell>
          <table:table-cell table:style-name="ce407" office:value-type="percentage" office:value="0.095847007850266" calcext:value-type="percentage">
            <text:p>9.6%</text:p>
          </table:table-cell>
          <table:table-cell table:number-columns-repeated="4"/>
          <table:table-cell office:value-type="string" calcext:value-type="string">
            <text:p>(Rm-Rf)USA</text:p>
          </table:table-cell>
          <table:table-cell table:style-name="ce410" office:value-type="string" calcext:value-type="string">
            <text:p>=</text:p>
          </table:table-cell>
          <table:table-cell table:style-name="ce93" table:formula="of:=+([.C10]-[.C9])" office:value-type="percentage" office:value="0.0463721055033392" calcext:value-type="percentage">
            <text:p>4.64 %</text:p>
          </table:table-cell>
          <table:table-cell table:number-columns-repeated="16374"/>
        </table:table-row>
        <table:table-row table:style-name="ro1">
          <table:table-cell table:number-columns-repeated="7"/>
          <table:table-cell office:value-type="string" calcext:value-type="string">
            <text:p>RpPERÚ</text:p>
          </table:table-cell>
          <table:table-cell table:style-name="ce410" office:value-type="string" calcext:value-type="string">
            <text:p>=</text:p>
          </table:table-cell>
          <table:table-cell table:style-name="ce93" office:value-type="percentage" office:value="0.0174" calcext:value-type="percentage">
            <text:p>1.74 %</text:p>
          </table:table-cell>
          <table:table-cell table:number-columns-repeated="16374"/>
        </table:table-row>
        <table:table-row table:style-name="ro1">
          <table:table-cell table:number-columns-repeated="7"/>
          <table:table-cell table:style-name="ce204" office:value-type="string" calcext:value-type="string">
            <text:p>Kurt</text:p>
          </table:table-cell>
          <table:table-cell table:style-name="ce411" office:value-type="string" calcext:value-type="string">
            <text:p>=</text:p>
          </table:table-cell>
          <table:table-cell table:style-name="ce414" table:formula="of:=+[.J8]+[.J9]*[.J10]+[.J11]" office:value-type="percentage" office:value="0.192079587205943" calcext:value-type="percentage">
            <text:p>19.21 %</text:p>
          </table:table-cell>
          <table:table-cell table:number-columns-repeated="16374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e y Wacc" table:style-name="ta17">
        <table:table-column table:style-name="co4" table:default-cell-style-name="ce16"/>
        <table:table-column table:style-name="co52" table:default-cell-style-name="ce16"/>
        <table:table-column table:style-name="co53" table:default-cell-style-name="ce16"/>
        <table:table-column table:style-name="co54" table:default-cell-style-name="ce16"/>
        <table:table-column table:style-name="co4" table:number-columns-repeated="4" table:default-cell-style-name="ce16"/>
        <table:table-column table:style-name="co14" table:default-cell-style-name="ce16"/>
        <table:table-column table:style-name="co4" table:number-columns-repeated="16375" table:default-cell-style-name="ce16"/>
        <table:table-row table:style-name="ro1">
          <table:table-cell table:number-columns-repeated="16384"/>
        </table:table-row>
        <table:table-row table:style-name="ro1">
          <table:table-cell/>
          <table:table-cell table:style-name="ce21" office:value-type="string" calcext:value-type="string">
            <text:p>COK Apalancado con riesgo total</text:p>
          </table:table-cell>
          <table:table-cell table:number-columns-repeated="5"/>
          <table:table-cell table:style-name="ce21" office:value-type="string" calcext:value-type="string">
            <text:p>Costo Promedio Ponderado de Capital con riesgo total</text:p>
          </table:table-cell>
          <table:table-cell table:style-name="ce21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>
            <draw:custom-shape draw:z-index="0" draw:name="CuadroTexto 1" draw:style-name="gr1" draw:text-style-name="P2" svg:width="9.247cm" svg:height="0.389cm" svg:x="0.945cm" svg:y="-0.174cm">
              <text:p text:style-name="P1"><text:span text:style-name="T1">𝐾𝑒𝑟𝑡</text:span><text:span text:style-name="T1">=𝑅𝑓𝑢𝑠𝑎+𝐵𝑟𝑙 𝑡𝑜𝑡𝑎𝑙 𝑃𝑒𝑟ú∗(𝑅𝑚−𝑅𝑓)𝑢𝑠𝑎+𝑅𝑝 𝑃𝑒𝑟ú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"/>
          <table:table-cell>
            <draw:custom-shape draw:z-index="2" draw:name="CuadroTexto 3" draw:style-name="gr1" draw:text-style-name="P2" svg:width="7.019cm" svg:height="0.453cm" svg:x="0.849cm" svg:y="-0.174cm">
              <text:p text:style-name="P1"><text:span text:style-name="T1">𝐾𝑤𝑎𝑐𝑐</text:span><text:span text:style-name="T1">=𝐸∕</text:span><text:span text:style-name="T1">〖𝑉∗𝐾𝑒𝑟𝑡</text:span><text:span text:style-name="T1">+𝐷∕𝑉∗𝐾𝑑∗(1−𝑡)</text:span><text:span text:style-name="T1">〗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Rfusa</text:p>
          </table:table-cell>
          <table:table-cell table:style-name="ce188" office:value-type="string" calcext:value-type="string">
            <text:p>=</text:p>
          </table:table-cell>
          <table:table-cell table:style-name="ce182" table:formula="of:=+[$Ku.C9]" office:value-type="float" office:value="0.0494749023469268" calcext:value-type="float">
            <text:p>0.05</text:p>
          </table:table-cell>
          <table:table-cell table:number-columns-repeated="3"/>
          <table:table-cell office:value-type="string" calcext:value-type="string">
            <text:p>E/V</text:p>
          </table:table-cell>
          <table:table-cell office:value-type="string" calcext:value-type="string">
            <text:p>=</text:p>
          </table:table-cell>
          <table:table-cell table:style-name="ce182" table:formula="of:=+[$'Inversión inicial'.H4]" office:value-type="float" office:value="0.628939675917026" calcext:value-type="float">
            <text:p>0.63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brl total PERU</text:p>
          </table:table-cell>
          <table:table-cell table:style-name="ce188" office:value-type="string" calcext:value-type="string">
            <text:p>=</text:p>
          </table:table-cell>
          <table:table-cell table:style-name="ce182" table:formula="of:=+[.D21]" office:value-type="float" office:value="3.82573036952576" calcext:value-type="float">
            <text:p>3.83</text:p>
          </table:table-cell>
          <table:table-cell table:number-columns-repeated="3"/>
          <table:table-cell office:value-type="string" calcext:value-type="string">
            <text:p>Kert</text:p>
          </table:table-cell>
          <table:table-cell office:value-type="string" calcext:value-type="string">
            <text:p>=</text:p>
          </table:table-cell>
          <table:table-cell table:style-name="ce93" table:formula="of:=+[.D11]" office:value-type="percentage" office:value="0.244282074669904" calcext:value-type="percentage">
            <text:p>24.43 %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(Rm – Rf)usa</text:p>
          </table:table-cell>
          <table:table-cell table:style-name="ce188" office:value-type="string" calcext:value-type="string">
            <text:p>=</text:p>
          </table:table-cell>
          <table:table-cell table:style-name="ce182" table:formula="of:=+[$Ku.C10]-[$Ku.C9]" office:value-type="float" office:value="0.0463721055033392" calcext:value-type="float">
            <text:p>0.05</text:p>
          </table:table-cell>
          <table:table-cell table:number-columns-repeated="3"/>
          <table:table-cell office:value-type="string" calcext:value-type="string">
            <text:p>D/V</text:p>
          </table:table-cell>
          <table:table-cell office:value-type="string" calcext:value-type="string">
            <text:p>=</text:p>
          </table:table-cell>
          <table:table-cell table:style-name="ce182" table:formula="of:=+[$'Inversión inicial'.I4]" office:value-type="float" office:value="0.371060324082974" calcext:value-type="float">
            <text:p>0.37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Rp</text:p>
          </table:table-cell>
          <table:table-cell table:style-name="ce188" office:value-type="string" calcext:value-type="string">
            <text:p>=</text:p>
          </table:table-cell>
          <table:table-cell table:style-name="ce182" table:formula="of:=+[$Ku.J11]" office:value-type="float" office:value="0.0174" calcext:value-type="float">
            <text:p>0.02</text:p>
          </table:table-cell>
          <table:table-cell table:number-columns-repeated="3"/>
          <table:table-cell office:value-type="string" calcext:value-type="string">
            <text:p>Kd</text:p>
          </table:table-cell>
          <table:table-cell office:value-type="string" calcext:value-type="string">
            <text:p>=</text:p>
          </table:table-cell>
          <table:table-cell table:style-name="ce182" table:formula="of:=+(1+[$Financiamiento.C2])^12 -1" office:value-type="float" office:value="0.1343" calcext:value-type="float">
            <text:p>0.13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88"/>
          <table:table-cell table:style-name="ce182"/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=</text:p>
          </table:table-cell>
          <table:table-cell table:style-name="ce182" office:value-type="float" office:value="0.2933" calcext:value-type="float">
            <text:p>0.29</text:p>
          </table:table-cell>
          <table:table-cell table:number-columns-repeated="16374"/>
        </table:table-row>
        <table:table-row table:style-name="ro1">
          <table:table-cell/>
          <table:table-cell table:style-name="ce204" office:value-type="string" calcext:value-type="string">
            <text:p>Kert</text:p>
          </table:table-cell>
          <table:table-cell table:style-name="ce415" office:value-type="string" calcext:value-type="string">
            <text:p>=</text:p>
          </table:table-cell>
          <table:table-cell table:style-name="ce414" table:formula="of:=+[.D6]+[.D7]*[.D8]+[.D9]" office:value-type="percentage" office:value="0.244282074669904" calcext:value-type="percentage">
            <text:p>24.43 %</text:p>
          </table:table-cell>
          <table:table-cell table:number-columns-repeated="16380"/>
        </table:table-row>
        <table:table-row table:style-name="ro1">
          <table:table-cell table:number-columns-repeated="7"/>
          <table:table-cell table:style-name="ce204" office:value-type="string" calcext:value-type="string">
            <text:p>Kwacc</text:p>
          </table:table-cell>
          <table:table-cell table:style-name="ce204" office:value-type="string" calcext:value-type="string">
            <text:p>=</text:p>
          </table:table-cell>
          <table:table-cell table:style-name="ce414" table:formula="of:=+[.J6]*[.J7]+[.J8]*[.J9]*(1-[.J10])" office:value-type="percentage" office:value="0.188855953732482" calcext:value-type="percentage">
            <text:p>18.89 %</text:p>
          </table:table-cell>
          <table:table-cell table:number-columns-repeated="16374"/>
        </table:table-row>
        <table:table-row table:style-name="ro1">
          <table:table-cell/>
          <table:table-cell table:style-name="ce21" office:value-type="string" calcext:value-type="string">
            <text:p>Beta reapalancado para el proyecto</text:p>
          </table:table-cell>
          <table:table-cell table:number-columns-repeated="16382"/>
        </table:table-row>
        <table:table-row table:style-name="ro1">
          <table:table-cell>
            <draw:custom-shape draw:z-index="1" draw:name="CuadroTexto 2" draw:style-name="gr1" draw:text-style-name="P2" svg:width="9.476cm" svg:height="0.453cm" svg:x="1.789cm" svg:y="0.07cm">
              <text:p text:style-name="P1"><text:span text:style-name="T1">𝐵𝑟𝑙 𝑡𝑜𝑡𝑎𝑙</text:span><text:span text:style-name="T1">=𝐵𝑢 𝑡𝑜𝑡𝑎𝑙 𝑀𝐸∗(1+</text:span><text:span text:style-name="T1">〖</text:span><text:span text:style-name="T1">(𝐷</text:span><text:span text:style-name="T1">〗∕〖𝐸</text:span><text:span text:style-name="T1">)∗(1−𝑡))𝑃𝑒𝑟ú</text:span><text:span text:style-name="T1">〗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u total ME</text:p>
          </table:table-cell>
          <table:table-cell office:value-type="string" calcext:value-type="string">
            <text:p>=</text:p>
          </table:table-cell>
          <table:table-cell table:style-name="ce38" table:formula="of:=+[$Ku.E6]" office:value-type="float" office:value="2.7" calcext:value-type="float">
            <text:p>2.70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/E*PERU</text:p>
          </table:table-cell>
          <table:table-cell office:value-type="string" calcext:value-type="string">
            <text:p>=</text:p>
          </table:table-cell>
          <table:table-cell table:style-name="ce38" table:formula="of:=+[$'Inversión inicial'.I4]/[$'Inversión inicial'.H4]" office:value-type="float" office:value="0.589977605629586" calcext:value-type="float">
            <text:p>0.59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*</text:p>
          </table:table-cell>
          <table:table-cell office:value-type="string" calcext:value-type="string">
            <text:p>=</text:p>
          </table:table-cell>
          <table:table-cell table:style-name="ce416" office:value-type="float" office:value="0.2933" calcext:value-type="float">
            <text:p>0.29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04" office:value-type="string" calcext:value-type="string">
            <text:p>βrl total perú </text:p>
          </table:table-cell>
          <table:table-cell table:style-name="ce204" office:value-type="string" calcext:value-type="string">
            <text:p>=</text:p>
          </table:table-cell>
          <table:table-cell table:style-name="ce417" table:formula="of:=+[.D17]*(1+[.D18]*(1-[.D19]))" office:value-type="float" office:value="3.82573036952576" calcext:value-type="float">
            <text:p>3.83</text:p>
          </table:table-cell>
          <table:table-cell table:number-columns-repeated="16380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lujo de caja" table:style-name="ta18">
        <table:table-column table:style-name="co53" table:default-cell-style-name="ce16"/>
        <table:table-column table:style-name="co55" table:default-cell-style-name="ce16"/>
        <table:table-column table:style-name="co56" table:default-cell-style-name="ce16"/>
        <table:table-column table:style-name="co19" table:default-cell-style-name="ce16"/>
        <table:table-column table:style-name="co57" table:default-cell-style-name="ce16"/>
        <table:table-column table:style-name="co58" table:default-cell-style-name="ce16"/>
        <table:table-column table:style-name="co59" table:default-cell-style-name="ce16"/>
        <table:table-column table:style-name="co56" table:default-cell-style-name="ce16"/>
        <table:table-column table:style-name="co60" table:default-cell-style-name="ce16"/>
        <table:table-column table:style-name="co12" table:default-cell-style-name="ce16"/>
        <table:table-column table:style-name="co60" table:number-columns-repeated="2" table:default-cell-style-name="ce16"/>
        <table:table-column table:style-name="co59" table:default-cell-style-name="ce16"/>
        <table:table-column table:style-name="co4" table:number-columns-repeated="16371" table:default-cell-style-name="ce16"/>
        <table:table-row table:style-name="ro1">
          <table:table-cell table:number-columns-repeated="16384"/>
        </table:table-row>
        <table:table-row table:style-name="ro1">
          <table:table-cell/>
          <table:table-cell table:style-name="ce23" office:value-type="string" calcext:value-type="string">
            <text:p>RUBRO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6372"/>
        </table:table-row>
        <table:table-row table:style-name="ro1">
          <table:table-cell/>
          <table:table-cell table:style-name="ce23" office:value-type="string" calcext:value-type="string">
            <text:p>ingresos sin igv</text:p>
          </table:table-cell>
          <table:table-cell table:style-name="ce59" table:formula="of:=+[$'Presupuesto de ventas'.S76]" office:value-type="float" office:value="1288011.08474576" calcext:value-type="float">
            <text:p>1,288,011.08</text:p>
          </table:table-cell>
          <table:table-cell table:style-name="ce59" table:formula="of:=+[$'Presupuesto de ventas'.T76]" office:value-type="float" office:value="1432233.18644068" calcext:value-type="float">
            <text:p>1,432,233.19</text:p>
          </table:table-cell>
          <table:table-cell table:style-name="ce59" table:formula="of:=+[$'Presupuesto de ventas'.U76]" office:value-type="float" office:value="1532490.36949153" calcext:value-type="float">
            <text:p>1,532,490.37</text:p>
          </table:table-cell>
          <table:table-cell table:style-name="ce59" table:formula="of:=+[$'Presupuesto de ventas'.V76]" office:value-type="float" office:value="1639765.48535593" calcext:value-type="float">
            <text:p>1,639,765.49</text:p>
          </table:table-cell>
          <table:table-cell table:style-name="ce59" table:formula="of:=+[$'Presupuesto de ventas'.W76]" office:value-type="float" office:value="1754549.78933085" calcext:value-type="float">
            <text:p>1,754,549.79</text:p>
          </table:table-cell>
          <table:table-cell table:style-name="ce59" table:formula="of:=+[$'Presupuesto de ventas'.X76]" office:value-type="float" office:value="1877368.92458401" calcext:value-type="float">
            <text:p>1,877,368.92</text:p>
          </table:table-cell>
          <table:table-cell table:style-name="ce59" table:formula="of:=+[$'Presupuesto de ventas'.Y76]" office:value-type="float" office:value="2008785.32930489" calcext:value-type="float">
            <text:p>2,008,785.33</text:p>
          </table:table-cell>
          <table:table-cell table:style-name="ce59" table:formula="of:=+[$'Presupuesto de ventas'.Z76]" office:value-type="float" office:value="2149400.81235623" calcext:value-type="float">
            <text:p>2,149,400.81</text:p>
          </table:table-cell>
          <table:table-cell table:style-name="ce59" table:formula="of:=+[$'Presupuesto de ventas'.AA76]" office:value-type="float" office:value="2299859.30922117" calcext:value-type="float">
            <text:p>2,299,859.31</text:p>
          </table:table-cell>
          <table:table-cell table:style-name="ce59" table:formula="of:=+[$'Presupuesto de ventas'.AB76]" office:value-type="float" office:value="2460849.83086665" calcext:value-type="float">
            <text:p>2,460,849.83</text:p>
          </table:table-cell>
          <table:table-cell table:number-columns-repeated="16372"/>
        </table:table-row>
        <table:table-row table:style-name="ro1">
          <table:table-cell/>
          <table:table-cell table:style-name="ce23" office:value-type="string" calcext:value-type="string">
            <text:p>egresos sin igv</text:p>
          </table:table-cell>
          <table:table-cell table:style-name="ce59" table:formula="of:=+[$'Costos Ventas'.C22]+[$Gastos_Operativos.$G$26]" office:value-type="float" office:value="975193.107344633" calcext:value-type="float">
            <text:p>975,193.11</text:p>
          </table:table-cell>
          <table:table-cell table:style-name="ce59" table:formula="of:=+[$'Costos Ventas'.D22]+[$Gastos_Operativos.$G$26]" office:value-type="float" office:value="1081311.32768362" calcext:value-type="float">
            <text:p>1,081,311.33</text:p>
          </table:table-cell>
          <table:table-cell table:style-name="ce59" table:formula="of:=+[$'Costos Ventas'.E22]+[$Gastos_Operativos.$G$26]" office:value-type="float" office:value="1154912.73870057" calcext:value-type="float">
            <text:p>1,154,912.74</text:p>
          </table:table-cell>
          <table:table-cell table:style-name="ce59" table:formula="of:=+[$'Costos Ventas'.F22]+[$Gastos_Operativos.$G$26]" office:value-type="float" office:value="1233666.2484887" calcext:value-type="float">
            <text:p>1,233,666.25</text:p>
          </table:table-cell>
          <table:table-cell table:style-name="ce59" table:formula="of:=+[$'Costos Ventas'.G22]+[$Gastos_Operativos.$G$26]" office:value-type="float" office:value="1317932.50396201" calcext:value-type="float">
            <text:p>1,317,932.50</text:p>
          </table:table-cell>
          <table:table-cell table:style-name="ce59" table:formula="of:=+[$'Costos Ventas'.H22]+[$Gastos_Operativos.$G$26]" office:value-type="float" office:value="1408097.39731844" calcext:value-type="float">
            <text:p>1,408,097.40</text:p>
          </table:table-cell>
          <table:table-cell table:style-name="ce59" table:formula="of:=+[$'Costos Ventas'.I22]+[$Gastos_Operativos.$G$26]" office:value-type="float" office:value="1504573.83320983" calcext:value-type="float">
            <text:p>1,504,573.83</text:p>
          </table:table-cell>
          <table:table-cell table:style-name="ce59" table:formula="of:=+[$'Costos Ventas'.J22]+[$Gastos_Operativos.$G$26]" office:value-type="float" office:value="1607803.61961361" calcext:value-type="float">
            <text:p>1,607,803.62</text:p>
          </table:table-cell>
          <table:table-cell table:style-name="ce59" table:formula="of:=+[$'Costos Ventas'.K22]+[$Gastos_Operativos.$G$26]" office:value-type="float" office:value="1718259.49106566" calcext:value-type="float">
            <text:p>1,718,259.49</text:p>
          </table:table-cell>
          <table:table-cell table:style-name="ce59" table:formula="of:=+[$'Costos Ventas'.L22]+[$Gastos_Operativos.$G$26]" office:value-type="float" office:value="1836447.27351936" calcext:value-type="float">
            <text:p>1,836,447.27</text:p>
          </table:table-cell>
          <table:table-cell table:number-columns-repeated="16372"/>
        </table:table-row>
        <table:table-row table:style-name="ro1">
          <table:table-cell/>
          <table:table-cell table:style-name="ce23" office:value-type="string" calcext:value-type="string">
            <text:p>Igv de activos fijos</text:p>
          </table:table-cell>
          <table:table-cell table:style-name="ce59" table:formula="of:=+-(SUM([$'Inversión inicial'.F10:.F25])+[$'Inversión inicial'.F28])*0.18" office:value-type="float" office:value="-101481.190387409" calcext:value-type="float">
            <text:p>-101,481.19</text:p>
          </table:table-cell>
          <table:table-cell table:style-name="ce59" table:formula="of:=+[.C6]" office:value-type="float" office:value="-45173.9544552058" calcext:value-type="float">
            <text:p>-45,173.95</text:p>
          </table:table-cell>
          <table:table-cell table:style-name="ce59" table:formula="of:=+[.D6]" office:value-type="float" office:value="17991.9801210654" calcext:value-type="float">
            <text:p>17,991.98</text:p>
          </table:table-cell>
          <table:table-cell table:style-name="ce59" table:number-columns-repeated="7"/>
          <table:table-cell table:number-columns-repeated="16372"/>
        </table:table-row>
        <table:table-row table:style-name="ro1">
          <table:table-cell/>
          <table:table-cell table:style-name="ce23" office:value-type="string" calcext:value-type="string">
            <text:p>pagos igv</text:p>
          </table:table-cell>
          <table:table-cell table:style-name="ce59" table:formula="of:=+([.C3]-[.C4])*0.18+[.C5]" office:value-type="float" office:value="-45173.9544552058" calcext:value-type="float">
            <text:p>-45,173.95</text:p>
          </table:table-cell>
          <table:table-cell table:style-name="ce59" table:formula="of:=+([.D3]-[.D4])*0.18+[.D5]" office:value-type="float" office:value="17991.9801210654" calcext:value-type="float">
            <text:p>17,991.98</text:p>
          </table:table-cell>
          <table:table-cell table:style-name="ce59" table:formula="of:=+([.E3]-[.E4])*0.18+[.E5]" office:value-type="float" office:value="85955.9536634382" calcext:value-type="float">
            <text:p>85,955.95</text:p>
          </table:table-cell>
          <table:table-cell table:style-name="ce59" table:formula="of:=+([.F3]-[.F4])*0.18+[.F5]" office:value-type="float" office:value="73097.8626361017" calcext:value-type="float">
            <text:p>73,097.86</text:p>
          </table:table-cell>
          <table:table-cell table:style-name="ce59" table:formula="of:=+([.G3]-[.G4])*0.18+[.G5]" office:value-type="float" office:value="78591.1113663915" calcext:value-type="float">
            <text:p>78,591.11</text:p>
          </table:table-cell>
          <table:table-cell table:style-name="ce59" table:formula="of:=+([.H3]-[.H4])*0.18+[.H5]" office:value-type="float" office:value="84468.8749078017" calcext:value-type="float">
            <text:p>84,468.87</text:p>
          </table:table-cell>
          <table:table-cell table:style-name="ce59" table:formula="of:=+([.I3]-[.I4])*0.18+[.I5]" office:value-type="float" office:value="90758.0692971105" calcext:value-type="float">
            <text:p>90,758.07</text:p>
          </table:table-cell>
          <table:table-cell table:style-name="ce59" table:formula="of:=+([.J3]-[.J4])*0.18+[.J5]" office:value-type="float" office:value="97487.4946936709" calcext:value-type="float">
            <text:p>97,487.49</text:p>
          </table:table-cell>
          <table:table-cell table:style-name="ce59" table:formula="of:=+([.K3]-[.K4])*0.18+[.K5]" office:value-type="float" office:value="104687.967267991" calcext:value-type="float">
            <text:p>104,687.97</text:p>
          </table:table-cell>
          <table:table-cell table:style-name="ce59" table:formula="of:=+([.L3]-[.L4])*0.18+[.L5]" office:value-type="float" office:value="112392.460322513" calcext:value-type="float">
            <text:p>112,392.46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97" table:formula="of:=([.D3]-[.D4])*0.18+[.D5]" office:value-type="float" office:value="17991.9801210654" calcext:value-type="float">
            <text:p>17992</text:p>
          </table:table-cell>
          <table:table-cell table:number-columns-repeated="16380"/>
        </table:table-row>
        <table:table-row table:style-name="ro1">
          <table:table-cell/>
          <table:table-cell table:style-name="ce20" office:value-type="string" calcext:value-type="string" table:number-columns-spanned="12" table:number-rows-spanned="1">
            <text:p>Flujo de caja</text:p>
          </table:table-cell>
          <table:covered-table-cell table:number-columns-repeated="11" table:style-name="ce33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418" office:value-type="string" calcext:value-type="string">
            <text:p>RUBRO</text:p>
          </table:table-cell>
          <table:table-cell table:style-name="ce418" office:value-type="string" calcext:value-type="string">
            <text:p>Año 0</text:p>
          </table:table-cell>
          <table:table-cell table:style-name="ce418" office:value-type="string" calcext:value-type="string">
            <text:p>Año 1</text:p>
          </table:table-cell>
          <table:table-cell table:style-name="ce418" office:value-type="string" calcext:value-type="string">
            <text:p>Año 2</text:p>
          </table:table-cell>
          <table:table-cell table:style-name="ce418" office:value-type="string" calcext:value-type="string">
            <text:p>Año 3</text:p>
          </table:table-cell>
          <table:table-cell table:style-name="ce418" office:value-type="string" calcext:value-type="string">
            <text:p>Año 4</text:p>
          </table:table-cell>
          <table:table-cell table:style-name="ce418" office:value-type="string" calcext:value-type="string">
            <text:p>Año 5</text:p>
          </table:table-cell>
          <table:table-cell table:style-name="ce418" office:value-type="string" calcext:value-type="string">
            <text:p>Año 6</text:p>
          </table:table-cell>
          <table:table-cell table:style-name="ce418" office:value-type="string" calcext:value-type="string">
            <text:p>Año 7</text:p>
          </table:table-cell>
          <table:table-cell table:style-name="ce418" office:value-type="string" calcext:value-type="string">
            <text:p>Año 8</text:p>
          </table:table-cell>
          <table:table-cell table:style-name="ce418" office:value-type="string" calcext:value-type="string">
            <text:p>Año 9</text:p>
          </table:table-cell>
          <table:table-cell table:style-name="ce418" office:value-type="string" calcext:value-type="string">
            <text:p>Año 10</text:p>
          </table:table-cell>
          <table:table-cell table:number-columns-repeated="16371"/>
        </table:table-row>
        <table:table-row table:style-name="ro1">
          <table:table-cell/>
          <table:table-cell table:style-name="ce419" office:value-type="string" calcext:value-type="string">
            <text:p>Activo fijo tangible</text:p>
          </table:table-cell>
          <table:table-cell table:style-name="ce423" table:formula="of:=+-[$'Inversión inicial'.F8]" office:value-type="float" office:value="-750225.069007264" calcext:value-type="float">
            <text:p>-750,225</text:p>
          </table:table-cell>
          <table:table-cell table:style-name="ce423" table:number-columns-repeated="3"/>
          <table:table-cell table:style-name="ce423" table:formula="of:=+-[$'Inversión inicial'.$F$25]" office:value-type="float" office:value="-2711.86440677966" calcext:value-type="float">
            <text:p>-2,712</text:p>
          </table:table-cell>
          <table:table-cell table:style-name="ce423" table:number-columns-repeated="3"/>
          <table:table-cell table:style-name="ce423" table:formula="of:=+-[$'Inversión inicial'.$F$25]" office:value-type="float" office:value="-2711.86440677966" calcext:value-type="float">
            <text:p>-2,712</text:p>
          </table:table-cell>
          <table:table-cell table:style-name="ce423" table:number-columns-repeated="2"/>
          <table:table-cell table:number-columns-repeated="16371"/>
        </table:table-row>
        <table:table-row table:style-name="ro1">
          <table:table-cell/>
          <table:table-cell table:style-name="ce419" office:value-type="string" calcext:value-type="string">
            <text:p>Activo fijo intangible</text:p>
          </table:table-cell>
          <table:table-cell table:style-name="ce423" table:formula="of:=+-[$'Inversión inicial'.F27]" office:value-type="float" office:value="-16759.3220338983" calcext:value-type="float">
            <text:p>-16,759</text:p>
          </table:table-cell>
          <table:table-cell table:style-name="ce423" table:number-columns-repeated="10"/>
          <table:table-cell table:number-columns-repeated="16371"/>
        </table:table-row>
        <table:table-row table:style-name="ro1">
          <table:table-cell/>
          <table:table-cell table:style-name="ce419" office:value-type="string" calcext:value-type="string">
            <text:p>Cpital de trabajo</text:p>
          </table:table-cell>
          <table:table-cell table:style-name="ce423" table:formula="of:=+-[$Capital_Trabajo.C132]" office:value-type="float" office:value="-63370.5720445501" calcext:value-type="float">
            <text:p>-63,371</text:p>
          </table:table-cell>
          <table:table-cell table:style-name="ce423" table:formula="of:=+-[$Capital_Trabajo.D132]" office:value-type="float" office:value="-7113.67322533821" calcext:value-type="float">
            <text:p>-7,114</text:p>
          </table:table-cell>
          <table:table-cell table:style-name="ce423" table:formula="of:=+-[$Capital_Trabajo.E132]" office:value-type="float" office:value="-4933.89716889219" calcext:value-type="float">
            <text:p>-4,934</text:p>
          </table:table-cell>
          <table:table-cell table:style-name="ce423" table:formula="of:=+-[$Capital_Trabajo.F132]" office:value-type="float" office:value="-5279.26997071465" calcext:value-type="float">
            <text:p>-5,279</text:p>
          </table:table-cell>
          <table:table-cell table:style-name="ce423" table:formula="of:=+-[$Capital_Trabajo.G132]" office:value-type="float" office:value="-5648.81886866465" calcext:value-type="float">
            <text:p>-5,649</text:p>
          </table:table-cell>
          <table:table-cell table:style-name="ce423" table:formula="of:=+-[$Capital_Trabajo.H132]" office:value-type="float" office:value="-6044.23618947119" calcext:value-type="float">
            <text:p>-6,044</text:p>
          </table:table-cell>
          <table:table-cell table:style-name="ce423" table:formula="of:=+-[$Capital_Trabajo.I132]" office:value-type="float" office:value="-6467.33272273418" calcext:value-type="float">
            <text:p>-6,467</text:p>
          </table:table-cell>
          <table:table-cell table:style-name="ce423" table:formula="of:=+-[$Capital_Trabajo.J132]" office:value-type="float" office:value="-6920.04601332558" calcext:value-type="float">
            <text:p>-6,920</text:p>
          </table:table-cell>
          <table:table-cell table:style-name="ce423" table:formula="of:=+-[$Capital_Trabajo.K132]" office:value-type="float" office:value="-7404.44923425835" calcext:value-type="float">
            <text:p>-7,404</text:p>
          </table:table-cell>
          <table:table-cell table:style-name="ce423" table:formula="of:=+-[$Capital_Trabajo.L132]" office:value-type="float" office:value="-7922.76068065644" calcext:value-type="float">
            <text:p>-7,923</text:p>
          </table:table-cell>
          <table:table-cell table:style-name="ce428" table:formula="of:=+-[$Capital_Trabajo.M132]" office:value-type="float" office:value="-0" calcext:value-type="float">
            <text:p>0</text:p>
          </table:table-cell>
          <table:table-cell table:number-columns-repeated="16371"/>
        </table:table-row>
        <table:table-row table:style-name="ro1">
          <table:table-cell/>
          <table:table-cell table:style-name="ce419" office:value-type="string" calcext:value-type="string">
            <text:p>Recupero de capital de trabajo</text:p>
          </table:table-cell>
          <table:table-cell table:style-name="ce423" table:number-columns-repeated="10"/>
          <table:table-cell table:style-name="ce423" table:formula="of:=[$Capital_Trabajo.N133]" office:value-type="float" office:value="121105.056118606" calcext:value-type="float">
            <text:p>121,105</text:p>
          </table:table-cell>
          <table:table-cell table:number-columns-repeated="16371"/>
        </table:table-row>
        <table:table-row table:style-name="ro1">
          <table:table-cell/>
          <table:table-cell table:style-name="ce419" office:value-type="string" calcext:value-type="string">
            <text:p>Recupero de activo fijo tangible</text:p>
          </table:table-cell>
          <table:table-cell table:style-name="ce423" table:number-columns-repeated="10"/>
          <table:table-cell table:style-name="ce423" table:formula="of:=[$'Depreciación y VR'.H24]" office:value-type="float" office:value="408983.050847458" calcext:value-type="float">
            <text:p>408,983</text:p>
          </table:table-cell>
          <table:table-cell table:number-columns-repeated="16371"/>
        </table:table-row>
        <table:table-row table:style-name="ro1">
          <table:table-cell/>
          <table:table-cell table:style-name="ce419" office:value-type="string" calcext:value-type="string">
            <text:p>Flujo de Inversión y Liquidación</text:p>
          </table:table-cell>
          <table:table-cell table:style-name="ce424" table:formula="of:=SUM([.C12:.C16])" office:value-type="float" office:value="-830354.963085712" calcext:value-type="float">
            <text:p>-830,355</text:p>
          </table:table-cell>
          <table:table-cell table:style-name="ce424" table:formula="of:=SUM([.D12:.D16])" office:value-type="float" office:value="-7113.67322533821" calcext:value-type="float">
            <text:p>-7,114</text:p>
          </table:table-cell>
          <table:table-cell table:style-name="ce424" table:formula="of:=SUM([.E12:.E16])" office:value-type="float" office:value="-4933.89716889219" calcext:value-type="float">
            <text:p>-4,934</text:p>
          </table:table-cell>
          <table:table-cell table:style-name="ce424" table:formula="of:=SUM([.F12:.F16])" office:value-type="float" office:value="-5279.26997071465" calcext:value-type="float">
            <text:p>-5,279</text:p>
          </table:table-cell>
          <table:table-cell table:style-name="ce424" table:formula="of:=SUM([.G12:.G16])" office:value-type="float" office:value="-8360.68327544431" calcext:value-type="float">
            <text:p>-8,361</text:p>
          </table:table-cell>
          <table:table-cell table:style-name="ce424" table:formula="of:=SUM([.H12:.H16])" office:value-type="float" office:value="-6044.23618947119" calcext:value-type="float">
            <text:p>-6,044</text:p>
          </table:table-cell>
          <table:table-cell table:style-name="ce424" table:formula="of:=SUM([.I12:.I16])" office:value-type="float" office:value="-6467.33272273418" calcext:value-type="float">
            <text:p>-6,467</text:p>
          </table:table-cell>
          <table:table-cell table:style-name="ce424" table:formula="of:=SUM([.J12:.J16])" office:value-type="float" office:value="-6920.04601332558" calcext:value-type="float">
            <text:p>-6,920</text:p>
          </table:table-cell>
          <table:table-cell table:style-name="ce424" table:formula="of:=SUM([.K12:.K16])" office:value-type="float" office:value="-10116.313641038" calcext:value-type="float">
            <text:p>-10,116</text:p>
          </table:table-cell>
          <table:table-cell table:style-name="ce424" table:formula="of:=SUM([.L12:.L16])" office:value-type="float" office:value="-7922.76068065644" calcext:value-type="float">
            <text:p>-7,923</text:p>
          </table:table-cell>
          <table:table-cell table:style-name="ce424" table:formula="of:=SUM([.M12:.M16])" office:value-type="float" office:value="530088.106966063" calcext:value-type="float">
            <text:p>530,088</text:p>
          </table:table-cell>
          <table:table-cell table:number-columns-repeated="16371"/>
        </table:table-row>
        <table:table-row table:style-name="ro1">
          <table:table-cell/>
          <table:table-cell table:style-name="ce419" office:value-type="string" calcext:value-type="string">
            <text:p>Ingreso por ventas</text:p>
          </table:table-cell>
          <table:table-cell table:style-name="ce423"/>
          <table:table-cell table:style-name="ce423" table:formula="of:=+[$'Presupuesto de ventas'.L125]" office:value-type="float" office:value="1298601.08474576" calcext:value-type="float">
            <text:p>1,298,601</text:p>
          </table:table-cell>
          <table:table-cell table:style-name="ce423" table:formula="of:=+[$'Presupuesto de ventas'.M125]" office:value-type="float" office:value="1443558.18644068" calcext:value-type="float">
            <text:p>1,443,558</text:p>
          </table:table-cell>
          <table:table-cell table:style-name="ce423" table:formula="of:=+[$'Presupuesto de ventas'.N125]" office:value-type="float" office:value="1544610.36949153" calcext:value-type="float">
            <text:p>1,544,610</text:p>
          </table:table-cell>
          <table:table-cell table:style-name="ce423" table:formula="of:=+[$'Presupuesto de ventas'.O125]" office:value-type="float" office:value="1652740.48535593" calcext:value-type="float">
            <text:p>1,652,740</text:p>
          </table:table-cell>
          <table:table-cell table:style-name="ce423" table:formula="of:=+[$'Presupuesto de ventas'.P125]" office:value-type="float" office:value="1768439.78933085" calcext:value-type="float">
            <text:p>1,768,440</text:p>
          </table:table-cell>
          <table:table-cell table:style-name="ce423" table:formula="of:=+[$'Presupuesto de ventas'.Q125]" office:value-type="float" office:value="1892233.92458401" calcext:value-type="float">
            <text:p>1,892,234</text:p>
          </table:table-cell>
          <table:table-cell table:style-name="ce423" table:formula="of:=+[$'Presupuesto de ventas'.R125]" office:value-type="float" office:value="2024685.32930489" calcext:value-type="float">
            <text:p>2,024,685</text:p>
          </table:table-cell>
          <table:table-cell table:style-name="ce423" table:formula="of:=+[$'Presupuesto de ventas'.S125]" office:value-type="float" office:value="2166410.81235623" calcext:value-type="float">
            <text:p>2,166,411</text:p>
          </table:table-cell>
          <table:table-cell table:style-name="ce423" table:formula="of:=+[$'Presupuesto de ventas'.T125]" office:value-type="float" office:value="2318054.30922117" calcext:value-type="float">
            <text:p>2,318,054</text:p>
          </table:table-cell>
          <table:table-cell table:style-name="ce423" table:formula="of:=+[$'Presupuesto de ventas'.U125]" office:value-type="float" office:value="2480319.83086665" calcext:value-type="float">
            <text:p>2,480,320</text:p>
          </table:table-cell>
          <table:table-cell table:number-columns-repeated="16371"/>
        </table:table-row>
        <table:table-row table:style-name="ro1">
          <table:table-cell/>
          <table:table-cell table:style-name="ce419" office:value-type="string" calcext:value-type="string">
            <text:p>Costos de producción (*)</text:p>
          </table:table-cell>
          <table:table-cell table:style-name="ce423"/>
          <table:table-cell table:style-name="ce423" table:formula="of:=+-[$'Costos Ventas'.C22]" office:value-type="float" office:value="-945330.508474576" calcext:value-type="float">
            <text:p>-945,331</text:p>
          </table:table-cell>
          <table:table-cell table:style-name="ce423" table:formula="of:=+-[$'Costos Ventas'.D22]" office:value-type="float" office:value="-1051448.72881356" calcext:value-type="float">
            <text:p>-1,051,449</text:p>
          </table:table-cell>
          <table:table-cell table:style-name="ce423" table:formula="of:=+-[$'Costos Ventas'.E22]" office:value-type="float" office:value="-1125050.13983051" calcext:value-type="float">
            <text:p>-1,125,050</text:p>
          </table:table-cell>
          <table:table-cell table:style-name="ce423" table:formula="of:=+-[$'Costos Ventas'.F22]" office:value-type="float" office:value="-1203803.64961864" calcext:value-type="float">
            <text:p>-1,203,804</text:p>
          </table:table-cell>
          <table:table-cell table:style-name="ce423" table:formula="of:=+-[$'Costos Ventas'.G22]" office:value-type="float" office:value="-1288069.90509195" calcext:value-type="float">
            <text:p>-1,288,070</text:p>
          </table:table-cell>
          <table:table-cell table:style-name="ce423" table:formula="of:=+-[$'Costos Ventas'.H22]" office:value-type="float" office:value="-1378234.79844839" calcext:value-type="float">
            <text:p>-1,378,235</text:p>
          </table:table-cell>
          <table:table-cell table:style-name="ce423" table:formula="of:=+-[$'Costos Ventas'.I22]" office:value-type="float" office:value="-1474711.23433977" calcext:value-type="float">
            <text:p>-1,474,711</text:p>
          </table:table-cell>
          <table:table-cell table:style-name="ce423" table:formula="of:=+-[$'Costos Ventas'.J22]" office:value-type="float" office:value="-1577941.02074356" calcext:value-type="float">
            <text:p>-1,577,941</text:p>
          </table:table-cell>
          <table:table-cell table:style-name="ce423" table:formula="of:=+-[$'Costos Ventas'.K22]" office:value-type="float" office:value="-1688396.89219561" calcext:value-type="float">
            <text:p>-1,688,397</text:p>
          </table:table-cell>
          <table:table-cell table:style-name="ce423" table:formula="of:=+-[$'Costos Ventas'.L22]" office:value-type="float" office:value="-1806584.6746493" calcext:value-type="float">
            <text:p>-1,806,585</text:p>
          </table:table-cell>
          <table:table-cell table:number-columns-repeated="16371"/>
        </table:table-row>
        <table:table-row table:style-name="ro1">
          <table:table-cell/>
          <table:table-cell table:style-name="ce419" office:value-type="string" calcext:value-type="string">
            <text:p>Gastos operativos (*)</text:p>
          </table:table-cell>
          <table:table-cell table:style-name="ce423"/>
          <table:table-cell table:style-name="ce423" table:formula="of:=+-[$Gastos_Operativos.$G$25]*12" office:value-type="float" office:value="-92218.7488700565" calcext:value-type="float">
            <text:p>-92,219</text:p>
          </table:table-cell>
          <table:table-cell table:style-name="ce423" table:formula="of:=+-[$Gastos_Operativos.$G$25]*12" office:value-type="float" office:value="-92218.7488700565" calcext:value-type="float">
            <text:p>-92,219</text:p>
          </table:table-cell>
          <table:table-cell table:style-name="ce423" table:formula="of:=+-[$Gastos_Operativos.$G$25]*12" office:value-type="float" office:value="-92218.7488700565" calcext:value-type="float">
            <text:p>-92,219</text:p>
          </table:table-cell>
          <table:table-cell table:style-name="ce423" table:formula="of:=+-[$Gastos_Operativos.$G$25]*12" office:value-type="float" office:value="-92218.7488700565" calcext:value-type="float">
            <text:p>-92,219</text:p>
          </table:table-cell>
          <table:table-cell table:style-name="ce423" table:formula="of:=+-[$Gastos_Operativos.$G$25]*12" office:value-type="float" office:value="-92218.7488700565" calcext:value-type="float">
            <text:p>-92,219</text:p>
          </table:table-cell>
          <table:table-cell table:style-name="ce423" table:formula="of:=+-[$Gastos_Operativos.$G$25]*12" office:value-type="float" office:value="-92218.7488700565" calcext:value-type="float">
            <text:p>-92,219</text:p>
          </table:table-cell>
          <table:table-cell table:style-name="ce423" table:formula="of:=+-[$Gastos_Operativos.$G$25]*12" office:value-type="float" office:value="-92218.7488700565" calcext:value-type="float">
            <text:p>-92,219</text:p>
          </table:table-cell>
          <table:table-cell table:style-name="ce423" table:formula="of:=+-[$Gastos_Operativos.$G$25]*12" office:value-type="float" office:value="-92218.7488700565" calcext:value-type="float">
            <text:p>-92,219</text:p>
          </table:table-cell>
          <table:table-cell table:style-name="ce423" table:formula="of:=+-[$Gastos_Operativos.$G$25]*12" office:value-type="float" office:value="-92218.7488700565" calcext:value-type="float">
            <text:p>-92,219</text:p>
          </table:table-cell>
          <table:table-cell table:style-name="ce423" table:formula="of:=+-[$Gastos_Operativos.$G$25]*12" office:value-type="float" office:value="-92218.7488700565" calcext:value-type="float">
            <text:p>-92,219</text:p>
          </table:table-cell>
          <table:table-cell table:number-columns-repeated="16371"/>
        </table:table-row>
        <table:table-row table:style-name="ro1">
          <table:table-cell/>
          <table:table-cell table:style-name="ce419" office:value-type="string" calcext:value-type="string">
            <text:p>Pago de IGV</text:p>
          </table:table-cell>
          <table:table-cell table:style-name="ce423" table:number-columns-repeated="2"/>
          <table:table-cell table:style-name="ce423" table:formula="of:=-[.D6]" office:value-type="float" office:value="-17991.9801210654" calcext:value-type="float">
            <text:p>-17,992</text:p>
          </table:table-cell>
          <table:table-cell table:style-name="ce423" table:formula="of:=-[.E6]" office:value-type="float" office:value="-85955.9536634382" calcext:value-type="float">
            <text:p>-85,956</text:p>
          </table:table-cell>
          <table:table-cell table:style-name="ce423" table:formula="of:=-[.F6]" office:value-type="float" office:value="-73097.8626361017" calcext:value-type="float">
            <text:p>-73,098</text:p>
          </table:table-cell>
          <table:table-cell table:style-name="ce423" table:formula="of:=-[.G6]" office:value-type="float" office:value="-78591.1113663915" calcext:value-type="float">
            <text:p>-78,591</text:p>
          </table:table-cell>
          <table:table-cell table:style-name="ce423" table:formula="of:=-[.H6]" office:value-type="float" office:value="-84468.8749078017" calcext:value-type="float">
            <text:p>-84,469</text:p>
          </table:table-cell>
          <table:table-cell table:style-name="ce423" table:formula="of:=-[.I6]" office:value-type="float" office:value="-90758.0692971105" calcext:value-type="float">
            <text:p>-90,758</text:p>
          </table:table-cell>
          <table:table-cell table:style-name="ce423" table:formula="of:=-[.J6]" office:value-type="float" office:value="-97487.4946936709" calcext:value-type="float">
            <text:p>-97,487</text:p>
          </table:table-cell>
          <table:table-cell table:style-name="ce423" table:formula="of:=-[.K6]" office:value-type="float" office:value="-104687.967267991" calcext:value-type="float">
            <text:p>-104,688</text:p>
          </table:table-cell>
          <table:table-cell table:style-name="ce423" table:formula="of:=-[.L6]" office:value-type="float" office:value="-112392.460322513" calcext:value-type="float">
            <text:p>-112,392</text:p>
          </table:table-cell>
          <table:table-cell table:number-columns-repeated="16371"/>
        </table:table-row>
        <table:table-row table:style-name="ro1">
          <table:table-cell/>
          <table:table-cell table:style-name="ce419" office:value-type="string" calcext:value-type="string">
            <text:p>Impuestos (**)</text:p>
          </table:table-cell>
          <table:table-cell table:style-name="ce423"/>
          <table:table-cell table:style-name="ce423" table:formula="of:=+[$'Estado de resultados'.D20]-[$Resumen.G4]*[$Financiamiento.D138]" office:value-type="float" office:value="-56429.82068649" calcext:value-type="float">
            <text:p>-56,430</text:p>
          </table:table-cell>
          <table:table-cell table:style-name="ce423" table:formula="of:=+[$'Estado de resultados'.E20]-[$Resumen.$G$4]*[$Financiamiento.E138]" office:value-type="float" office:value="-68542.8701423468" calcext:value-type="float">
            <text:p>-68,543</text:p>
          </table:table-cell>
          <table:table-cell table:style-name="ce423" table:formula="of:=+[$'Estado de resultados'.F20]-[$Resumen.$G$4]*[$Financiamiento.F138]" office:value-type="float" office:value="-77363.5143420829" calcext:value-type="float">
            <text:p>-77,364</text:p>
          </table:table-cell>
          <table:table-cell table:style-name="ce423" table:formula="of:=+[$'Estado de resultados'.G20]-[$Resumen.$G$4]*[$Financiamiento.G138]" office:value-type="float" office:value="-86826.2317487089" calcext:value-type="float">
            <text:p>-86,826</text:p>
          </table:table-cell>
          <table:table-cell table:style-name="ce423" table:formula="of:=+[$'Estado de resultados'.H20]-[$Resumen.$G$4]*[$Financiamiento.H138]" office:value-type="float" office:value="-96977.1195348211" calcext:value-type="float">
            <text:p>-96,977</text:p>
          </table:table-cell>
          <table:table-cell table:style-name="ce423" table:formula="of:=+[$'Estado de resultados'.I20]-[$Resumen.$G$4]*[$Financiamiento.I138]" office:value-type="float" office:value="-107865.746356697" calcext:value-type="float">
            <text:p>-107,866</text:p>
          </table:table-cell>
          <table:table-cell table:style-name="ce423" table:formula="of:=+[$'Estado de resultados'.J20]-[$Resumen.$G$4]*[$Financiamiento.J138]" office:value-type="float" office:value="-119545.420397001" calcext:value-type="float">
            <text:p>-119,545</text:p>
          </table:table-cell>
          <table:table-cell table:style-name="ce423" table:formula="of:=+[$'Estado de resultados'.K20]-[$Resumen.$G$4]*[$Financiamiento.K138]" office:value-type="float" office:value="-132077.903732759" calcext:value-type="float">
            <text:p>-132,078</text:p>
          </table:table-cell>
          <table:table-cell table:style-name="ce423" table:formula="of:=+[$'Estado de resultados'.L20]-[$Resumen.$G$4]*[$Financiamiento.L138]" office:value-type="float" office:value="-145524.874783582" calcext:value-type="float">
            <text:p>-145,525</text:p>
          </table:table-cell>
          <table:table-cell table:style-name="ce423" table:formula="of:=+[$'Estado de resultados'.M20]-[$Resumen.$G$4]*[$Financiamiento.M138]" office:value-type="float" office:value="-159957.115744798" calcext:value-type="float">
            <text:p>-159,957</text:p>
          </table:table-cell>
          <table:table-cell table:number-columns-repeated="16371"/>
        </table:table-row>
        <table:table-row table:style-name="ro1">
          <table:table-cell/>
          <table:table-cell table:style-name="ce419" office:value-type="string" calcext:value-type="string">
            <text:p>Flujo operativo</text:p>
          </table:table-cell>
          <table:table-cell table:style-name="ce425" table:formula="of:=SUM([.C18:.C22])" office:value-type="float" office:value="0" calcext:value-type="float">
            <text:p>0</text:p>
          </table:table-cell>
          <table:table-cell table:style-name="ce424" table:formula="of:=SUM([.D18:.D22])" office:value-type="float" office:value="204622.00671464" calcext:value-type="float">
            <text:p>204,622</text:p>
          </table:table-cell>
          <table:table-cell table:style-name="ce424" table:formula="of:=SUM([.E18:.E22])" office:value-type="float" office:value="213355.85849365" calcext:value-type="float">
            <text:p>213,356</text:p>
          </table:table-cell>
          <table:table-cell table:style-name="ce424" table:formula="of:=SUM([.F18:.F22])" office:value-type="float" office:value="164022.012785439" calcext:value-type="float">
            <text:p>164,022</text:p>
          </table:table-cell>
          <table:table-cell table:style-name="ce424" table:formula="of:=SUM([.G18:.G22])" office:value-type="float" office:value="196793.992482421" calcext:value-type="float">
            <text:p>196,794</text:p>
          </table:table-cell>
          <table:table-cell table:style-name="ce424" table:formula="of:=SUM([.H18:.H22])" office:value-type="float" office:value="212582.904467629" calcext:value-type="float">
            <text:p>212,583</text:p>
          </table:table-cell>
          <table:table-cell table:style-name="ce424" table:formula="of:=SUM([.I18:.I22])" office:value-type="float" office:value="229445.756001066" calcext:value-type="float">
            <text:p>229,446</text:p>
          </table:table-cell>
          <table:table-cell table:style-name="ce424" table:formula="of:=SUM([.J18:.J22])" office:value-type="float" office:value="247451.856400947" calcext:value-type="float">
            <text:p>247,452</text:p>
          </table:table-cell>
          <table:table-cell table:style-name="ce424" table:formula="of:=SUM([.K18:.K22])" office:value-type="float" office:value="266685.644316187" calcext:value-type="float">
            <text:p>266,686</text:p>
          </table:table-cell>
          <table:table-cell table:style-name="ce424" table:formula="of:=SUM([.L18:.L22])" office:value-type="float" office:value="287225.826103931" calcext:value-type="float">
            <text:p>287,226</text:p>
          </table:table-cell>
          <table:table-cell table:style-name="ce424" table:formula="of:=SUM([.M18:.M22])" office:value-type="float" office:value="309166.831279982" calcext:value-type="float">
            <text:p>309,167</text:p>
          </table:table-cell>
          <table:table-cell table:number-columns-repeated="16371"/>
        </table:table-row>
        <table:table-row table:style-name="ro1">
          <table:table-cell/>
          <table:table-cell table:style-name="ce420" office:value-type="string" calcext:value-type="string">
            <text:p>Flujo de Caja Económico, FCE</text:p>
          </table:table-cell>
          <table:table-cell table:style-name="ce426" table:formula="of:=+[.C17]+[.C23]" office:value-type="float" office:value="-830354.963085712" calcext:value-type="float">
            <text:p>-830,355</text:p>
          </table:table-cell>
          <table:table-cell table:style-name="ce426" table:formula="of:=+[.D17]+[.D23]" office:value-type="float" office:value="197508.333489302" calcext:value-type="float">
            <text:p>197,508</text:p>
          </table:table-cell>
          <table:table-cell table:style-name="ce426" table:formula="of:=+[.E17]+[.E23]" office:value-type="float" office:value="208421.961324758" calcext:value-type="float">
            <text:p>208,422</text:p>
          </table:table-cell>
          <table:table-cell table:style-name="ce426" table:formula="of:=+[.F17]+[.F23]" office:value-type="float" office:value="158742.742814725" calcext:value-type="float">
            <text:p>158,743</text:p>
          </table:table-cell>
          <table:table-cell table:style-name="ce426" table:formula="of:=+[.G17]+[.G23]" office:value-type="float" office:value="188433.309206977" calcext:value-type="float">
            <text:p>188,433</text:p>
          </table:table-cell>
          <table:table-cell table:style-name="ce426" table:formula="of:=+[.H17]+[.H23]" office:value-type="float" office:value="206538.668278158" calcext:value-type="float">
            <text:p>206,539</text:p>
          </table:table-cell>
          <table:table-cell table:style-name="ce426" table:formula="of:=+[.I17]+[.I23]" office:value-type="float" office:value="222978.423278331" calcext:value-type="float">
            <text:p>222,978</text:p>
          </table:table-cell>
          <table:table-cell table:style-name="ce426" table:formula="of:=+[.J17]+[.J23]" office:value-type="float" office:value="240531.810387621" calcext:value-type="float">
            <text:p>240,532</text:p>
          </table:table-cell>
          <table:table-cell table:style-name="ce426" table:formula="of:=+[.K17]+[.K23]" office:value-type="float" office:value="256569.330675149" calcext:value-type="float">
            <text:p>256,569</text:p>
          </table:table-cell>
          <table:table-cell table:style-name="ce426" table:formula="of:=+[.L17]+[.L23]" office:value-type="float" office:value="279303.065423274" calcext:value-type="float">
            <text:p>279,303</text:p>
          </table:table-cell>
          <table:table-cell table:style-name="ce426" table:formula="of:=+[.M17]+[.M23]" office:value-type="float" office:value="839254.938246046" calcext:value-type="float">
            <text:p>839,255</text:p>
          </table:table-cell>
          <table:table-cell table:style-name="ce195"/>
          <table:table-cell table:number-columns-repeated="16370"/>
        </table:table-row>
        <table:table-row table:style-name="ro1">
          <table:table-cell/>
          <table:table-cell table:style-name="ce419" office:value-type="string" calcext:value-type="string">
            <text:p>Préstamo</text:p>
          </table:table-cell>
          <table:table-cell table:style-name="ce423" table:formula="of:=+[$Financiamiento.C5]" office:value-type="float" office:value="350000" calcext:value-type="float">
            <text:p>350,000</text:p>
          </table:table-cell>
          <table:table-cell table:style-name="ce423" table:number-columns-repeated="10"/>
          <table:table-cell table:number-columns-repeated="16371"/>
        </table:table-row>
        <table:table-row table:style-name="ro1">
          <table:table-cell/>
          <table:table-cell table:style-name="ce419" office:value-type="string" calcext:value-type="string">
            <text:p>Capital</text:p>
          </table:table-cell>
          <table:table-cell table:style-name="ce423"/>
          <table:table-cell table:style-name="ce423" table:formula="of:=+-[$Financiamiento.D137]" office:value-type="float" office:value="-21716.5245409156" calcext:value-type="float">
            <text:p>-21,717</text:p>
          </table:table-cell>
          <table:table-cell table:style-name="ce423" table:formula="of:=+-[$Financiamiento.E137]" office:value-type="float" office:value="-23938.8277811085" calcext:value-type="float">
            <text:p>-23,939</text:p>
          </table:table-cell>
          <table:table-cell table:style-name="ce423" table:formula="of:=+-[$Financiamiento.F137]" office:value-type="float" office:value="-26388.544559875" calcext:value-type="float">
            <text:p>-26,389</text:p>
          </table:table-cell>
          <table:table-cell table:style-name="ce423" table:formula="of:=+-[$Financiamiento.G137]" office:value-type="float" office:value="-29088.9466416581" calcext:value-type="float">
            <text:p>-29,089</text:p>
          </table:table-cell>
          <table:table-cell table:style-name="ce423" table:formula="of:=+-[$Financiamiento.H137]" office:value-type="float" office:value="-32065.687245513" calcext:value-type="float">
            <text:p>-32,066</text:p>
          </table:table-cell>
          <table:table-cell table:style-name="ce423" table:formula="of:=+-[$Financiamiento.I137]" office:value-type="float" office:value="-35347.044744981" calcext:value-type="float">
            <text:p>-35,347</text:p>
          </table:table-cell>
          <table:table-cell table:style-name="ce423" table:formula="of:=+-[$Financiamiento.J137]" office:value-type="float" office:value="-38964.1913063479" calcext:value-type="float">
            <text:p>-38,964</text:p>
          </table:table-cell>
          <table:table-cell table:style-name="ce423" table:formula="of:=+-[$Financiamiento.K137]" office:value-type="float" office:value="-42951.489017289" calcext:value-type="float">
            <text:p>-42,951</text:p>
          </table:table-cell>
          <table:table-cell table:style-name="ce423" table:formula="of:=+-[$Financiamiento.L137]" office:value-type="float" office:value="-47346.8163190583" calcext:value-type="float">
            <text:p>-47,347</text:p>
          </table:table-cell>
          <table:table-cell table:style-name="ce423" table:formula="of:=+-[$Financiamiento.M137]" office:value-type="float" office:value="-52191.9278432536" calcext:value-type="float">
            <text:p>-52,192</text:p>
          </table:table-cell>
          <table:table-cell table:number-columns-repeated="16371"/>
        </table:table-row>
        <table:table-row table:style-name="ro1">
          <table:table-cell/>
          <table:table-cell table:style-name="ce419" office:value-type="string" calcext:value-type="string">
            <text:p>Interés </text:p>
          </table:table-cell>
          <table:table-cell table:style-name="ce423"/>
          <table:table-cell table:style-name="ce423" table:formula="of:=+-[$Financiamiento.D138]" office:value-type="float" office:value="-33282.1317326412" calcext:value-type="float">
            <text:p>-33,282</text:p>
          </table:table-cell>
          <table:table-cell table:style-name="ce423" table:formula="of:=+-[$Financiamiento.E138]" office:value-type="float" office:value="-31059.8284924483" calcext:value-type="float">
            <text:p>-31,060</text:p>
          </table:table-cell>
          <table:table-cell table:style-name="ce423" table:formula="of:=+-[$Financiamiento.F138]" office:value-type="float" office:value="-28610.1117136818" calcext:value-type="float">
            <text:p>-28,610</text:p>
          </table:table-cell>
          <table:table-cell table:style-name="ce423" table:formula="of:=+-[$Financiamiento.G138]" office:value-type="float" office:value="-25909.7096318986" calcext:value-type="float">
            <text:p>-25,910</text:p>
          </table:table-cell>
          <table:table-cell table:style-name="ce423" table:formula="of:=+-[$Financiamiento.H138]" office:value-type="float" office:value="-22932.9690280438" calcext:value-type="float">
            <text:p>-22,933</text:p>
          </table:table-cell>
          <table:table-cell table:style-name="ce423" table:formula="of:=+-[$Financiamiento.I138]" office:value-type="float" office:value="-19651.6115285758" calcext:value-type="float">
            <text:p>-19,652</text:p>
          </table:table-cell>
          <table:table-cell table:style-name="ce423" table:formula="of:=+-[$Financiamiento.J138]" office:value-type="float" office:value="-16034.4649672089" calcext:value-type="float">
            <text:p>-16,034</text:p>
          </table:table-cell>
          <table:table-cell table:style-name="ce423" table:formula="of:=+-[$Financiamiento.K138]" office:value-type="float" office:value="-12047.1672562677" calcext:value-type="float">
            <text:p>-12,047</text:p>
          </table:table-cell>
          <table:table-cell table:style-name="ce423" table:formula="of:=+-[$Financiamiento.L138]" office:value-type="float" office:value="-7651.83995449846" calcext:value-type="float">
            <text:p>-7,652</text:p>
          </table:table-cell>
          <table:table-cell table:style-name="ce423" table:formula="of:=+-[$Financiamiento.M138]" office:value-type="float" office:value="-2806.72843030321" calcext:value-type="float">
            <text:p>-2,807</text:p>
          </table:table-cell>
          <table:table-cell table:number-columns-repeated="16371"/>
        </table:table-row>
        <table:table-row table:style-name="ro1">
          <table:table-cell/>
          <table:table-cell table:style-name="ce419" office:value-type="string" calcext:value-type="string">
            <text:p>Escudo fiscal de intereses</text:p>
          </table:table-cell>
          <table:table-cell table:style-name="ce423"/>
          <table:table-cell table:style-name="ce423" table:formula="of:=-([.D27]*[$Resumen.$G$3])" office:value-type="float" office:value="9818.22886112914" calcext:value-type="float">
            <text:p>9,818</text:p>
          </table:table-cell>
          <table:table-cell table:style-name="ce423" table:formula="of:=-([.E27]*[$Resumen.$G$3])" office:value-type="float" office:value="9162.64940527225" calcext:value-type="float">
            <text:p>9,163</text:p>
          </table:table-cell>
          <table:table-cell table:style-name="ce423" table:formula="of:=-([.F27]*[$Resumen.$G$3])" office:value-type="float" office:value="8439.98295553613" calcext:value-type="float">
            <text:p>8,440</text:p>
          </table:table-cell>
          <table:table-cell table:style-name="ce423" table:formula="of:=-([.G27]*[$Resumen.$G$3])" office:value-type="float" office:value="7643.3643414101" calcext:value-type="float">
            <text:p>7,643</text:p>
          </table:table-cell>
          <table:table-cell table:style-name="ce423" table:formula="of:=-([.H27]*[$Resumen.$G$3])" office:value-type="float" office:value="6765.22586327292" calcext:value-type="float">
            <text:p>6,765</text:p>
          </table:table-cell>
          <table:table-cell table:style-name="ce423" table:formula="of:=-([.I27]*[$Resumen.$G$3])" office:value-type="float" office:value="5797.22540092987" calcext:value-type="float">
            <text:p>5,797</text:p>
          </table:table-cell>
          <table:table-cell table:style-name="ce423" table:formula="of:=-([.J27]*[$Resumen.$G$3])" office:value-type="float" office:value="4730.16716532663" calcext:value-type="float">
            <text:p>4,730</text:p>
          </table:table-cell>
          <table:table-cell table:style-name="ce423" table:formula="of:=-([.K27]*[$Resumen.$G$3])" office:value-type="float" office:value="3553.91434059898" calcext:value-type="float">
            <text:p>3,554</text:p>
          </table:table-cell>
          <table:table-cell table:style-name="ce423" table:formula="of:=-([.L27]*[$Resumen.$G$3])" office:value-type="float" office:value="2257.29278657705" calcext:value-type="float">
            <text:p>2,257</text:p>
          </table:table-cell>
          <table:table-cell table:style-name="ce423" table:formula="of:=-([.M27]*[$Resumen.$G$3])" office:value-type="float" office:value="827.984886939448" calcext:value-type="float">
            <text:p>828</text:p>
          </table:table-cell>
          <table:table-cell table:number-columns-repeated="16371"/>
        </table:table-row>
        <table:table-row table:style-name="ro1">
          <table:table-cell/>
          <table:table-cell table:style-name="ce421" office:value-type="string" calcext:value-type="string">
            <text:p>Flujo de Caja de Deuda, FCD</text:p>
          </table:table-cell>
          <table:table-cell table:style-name="ce424" table:formula="of:=SUM([.C25:.C28])" office:value-type="float" office:value="350000" calcext:value-type="float">
            <text:p>350,000</text:p>
          </table:table-cell>
          <table:table-cell table:style-name="ce424" table:formula="of:=SUM([.D25:.D28])" office:value-type="float" office:value="-45180.4274124276" calcext:value-type="float">
            <text:p>-45,180</text:p>
          </table:table-cell>
          <table:table-cell table:style-name="ce424" table:formula="of:=SUM([.E25:.E28])" office:value-type="float" office:value="-45836.0068682845" calcext:value-type="float">
            <text:p>-45,836</text:p>
          </table:table-cell>
          <table:table-cell table:style-name="ce424" table:formula="of:=SUM([.F25:.F28])" office:value-type="float" office:value="-46558.6733180207" calcext:value-type="float">
            <text:p>-46,559</text:p>
          </table:table-cell>
          <table:table-cell table:style-name="ce424" table:formula="of:=SUM([.G25:.G28])" office:value-type="float" office:value="-47355.2919321467" calcext:value-type="float">
            <text:p>-47,355</text:p>
          </table:table-cell>
          <table:table-cell table:style-name="ce424" table:formula="of:=SUM([.H25:.H28])" office:value-type="float" office:value="-48233.4304102839" calcext:value-type="float">
            <text:p>-48,233</text:p>
          </table:table-cell>
          <table:table-cell table:style-name="ce424" table:formula="of:=SUM([.I25:.I28])" office:value-type="float" office:value="-49201.4308726269" calcext:value-type="float">
            <text:p>-49,201</text:p>
          </table:table-cell>
          <table:table-cell table:style-name="ce424" table:formula="of:=SUM([.J25:.J28])" office:value-type="float" office:value="-50268.4891082302" calcext:value-type="float">
            <text:p>-50,268</text:p>
          </table:table-cell>
          <table:table-cell table:style-name="ce424" table:formula="of:=SUM([.K25:.K28])" office:value-type="float" office:value="-51444.7419329578" calcext:value-type="float">
            <text:p>-51,445</text:p>
          </table:table-cell>
          <table:table-cell table:style-name="ce424" table:formula="of:=SUM([.L25:.L28])" office:value-type="float" office:value="-52741.3634869797" calcext:value-type="float">
            <text:p>-52,741</text:p>
          </table:table-cell>
          <table:table-cell table:style-name="ce424" table:formula="of:=SUM([.M25:.M28])" office:value-type="float" office:value="-54170.6713866173" calcext:value-type="float">
            <text:p>-54,171</text:p>
          </table:table-cell>
          <table:table-cell table:number-columns-repeated="16371"/>
        </table:table-row>
        <table:table-row table:style-name="ro1">
          <table:table-cell/>
          <table:table-cell table:style-name="ce420" office:value-type="string" calcext:value-type="string">
            <text:p>Flujo de Caja Financiero, FCF</text:p>
          </table:table-cell>
          <table:table-cell table:style-name="ce426" table:formula="of:=SUM([.C24:.C28])" office:value-type="float" office:value="-480354.963085712" calcext:value-type="float">
            <text:p>-480,355</text:p>
          </table:table-cell>
          <table:table-cell table:style-name="ce426" table:formula="of:=SUM([.D24:.D28])" office:value-type="float" office:value="152327.906076874" calcext:value-type="float">
            <text:p>152,328</text:p>
          </table:table-cell>
          <table:table-cell table:style-name="ce426" table:formula="of:=SUM([.E24:.E28])" office:value-type="float" office:value="162585.954456473" calcext:value-type="float">
            <text:p>162,586</text:p>
          </table:table-cell>
          <table:table-cell table:style-name="ce426" table:formula="of:=SUM([.F24:.F28])" office:value-type="float" office:value="112184.069496704" calcext:value-type="float">
            <text:p>112,184</text:p>
          </table:table-cell>
          <table:table-cell table:style-name="ce426" table:formula="of:=SUM([.G24:.G28])" office:value-type="float" office:value="141078.01727483" calcext:value-type="float">
            <text:p>141,078</text:p>
          </table:table-cell>
          <table:table-cell table:style-name="ce426" table:formula="of:=SUM([.H24:.H28])" office:value-type="float" office:value="158305.237867874" calcext:value-type="float">
            <text:p>158,305</text:p>
          </table:table-cell>
          <table:table-cell table:style-name="ce426" table:formula="of:=SUM([.I24:.I28])" office:value-type="float" office:value="173776.992405704" calcext:value-type="float">
            <text:p>173,777</text:p>
          </table:table-cell>
          <table:table-cell table:style-name="ce426" table:formula="of:=SUM([.J24:.J28])" office:value-type="float" office:value="190263.321279391" calcext:value-type="float">
            <text:p>190,263</text:p>
          </table:table-cell>
          <table:table-cell table:style-name="ce426" table:formula="of:=SUM([.K24:.K28])" office:value-type="float" office:value="205124.588742191" calcext:value-type="float">
            <text:p>205,125</text:p>
          </table:table-cell>
          <table:table-cell table:style-name="ce426" table:formula="of:=SUM([.L24:.L28])" office:value-type="float" office:value="226561.701936294" calcext:value-type="float">
            <text:p>226,562</text:p>
          </table:table-cell>
          <table:table-cell table:style-name="ce426" table:formula="of:=SUM([.M24:.M28])" office:value-type="float" office:value="785084.266859428" calcext:value-type="float">
            <text:p>785,084</text:p>
          </table:table-cell>
          <table:table-cell table:style-name="ce195"/>
          <table:table-cell table:number-columns-repeated="16370"/>
        </table:table-row>
        <table:table-row table:style-name="ro1">
          <table:table-cell/>
          <table:table-cell table:style-name="ce419"/>
          <table:table-cell table:style-name="ce423" table:number-columns-repeated="11"/>
          <table:table-cell table:number-columns-repeated="16371"/>
        </table:table-row>
        <table:table-row table:style-name="ro1">
          <table:table-cell/>
          <table:table-cell table:style-name="ce420" office:value-type="string" calcext:value-type="string">
            <text:p>FCF Ajustado</text:p>
          </table:table-cell>
          <table:table-cell table:style-name="ce426" table:formula="of:=+[.C24]+[.C28]" office:value-type="float" office:value="-828926.75118817" calcext:value-type="float">
            <text:p>-828,927</text:p>
          </table:table-cell>
          <table:table-cell table:style-name="ce426" table:formula="of:=+[.D24]+[.D28]" office:value-type="float" office:value="240869.034864798" calcext:value-type="float">
            <text:p>240,869</text:p>
          </table:table-cell>
          <table:table-cell table:style-name="ce426" table:formula="of:=+[.E24]+[.E28]" office:value-type="float" office:value="236306.515383079" calcext:value-type="float">
            <text:p>236,307</text:p>
          </table:table-cell>
          <table:table-cell table:style-name="ce426" table:formula="of:=+[.F24]+[.F28]" office:value-type="float" office:value="178505.905137965" calcext:value-type="float">
            <text:p>178,506</text:p>
          </table:table-cell>
          <table:table-cell table:style-name="ce426" table:formula="of:=+[.G24]+[.G28]" office:value-type="float" office:value="227278.393051361" calcext:value-type="float">
            <text:p>227,278</text:p>
          </table:table-cell>
          <table:table-cell table:style-name="ce426" table:formula="of:=+[.H24]+[.H28]" office:value-type="float" office:value="246689.734009613" calcext:value-type="float">
            <text:p>246,690</text:p>
          </table:table-cell>
          <table:table-cell table:style-name="ce426" table:formula="of:=+[.I24]+[.I28]" office:value-type="float" office:value="264498.497338216" calcext:value-type="float">
            <text:p>264,498</text:p>
          </table:table-cell>
          <table:table-cell table:style-name="ce426" table:formula="of:=+[.J24]+[.J28]" office:value-type="float" office:value="283485.42561803" calcext:value-type="float">
            <text:p>283,485</text:p>
          </table:table-cell>
          <table:table-cell table:style-name="ce426" table:formula="of:=+[.K24]+[.K28]" office:value-type="float" office:value="301022.334445385" calcext:value-type="float">
            <text:p>301,022</text:p>
          </table:table-cell>
          <table:table-cell table:style-name="ce426" table:formula="of:=+[.L24]+[.L28]" office:value-type="float" office:value="325322.383899564" calcext:value-type="float">
            <text:p>325,322</text:p>
          </table:table-cell>
          <table:table-cell table:style-name="ce426" table:formula="of:=+[.M24]+[.M28]" office:value-type="float" office:value="884043.88045335" calcext:value-type="float">
            <text:p>884,044</text:p>
          </table:table-cell>
          <table:table-cell table:number-columns-repeated="16371"/>
        </table:table-row>
        <table:table-row table:style-name="ro1">
          <table:table-cell/>
          <table:table-cell table:style-name="ce422" office:value-type="string" calcext:value-type="string">
            <text:p>(*) Régimen lobaral de Pequeña Empresa</text:p>
          </table:table-cell>
          <table:table-cell table:style-name="ce422" table:number-columns-repeated="11"/>
          <table:table-cell table:number-columns-repeated="16371"/>
        </table:table-row>
        <table:table-row table:style-name="ro1">
          <table:table-cell/>
          <table:table-cell table:style-name="ce422" office:value-type="string" calcext:value-type="string">
            <text:p>(**) Regimen tributario <text:s/>General</text:p>
          </table:table-cell>
          <table:table-cell table:style-name="ce422"/>
          <table:table-cell table:style-name="ce427"/>
          <table:table-cell table:style-name="ce422" table:number-columns-repeated="9"/>
          <table:table-cell table:number-columns-repeated="16371"/>
        </table:table-row>
        <table:table-row table:style-name="ro1">
          <table:table-cell/>
          <table:table-cell table:style-name="ce422" table:number-columns-repeated="12"/>
          <table:table-cell table:number-columns-repeated="16371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ntabilidad" table:style-name="ta19">
        <office:forms form:automatic-focus="false" form:apply-design-mode="false"/>
        <table:table-column table:style-name="co4" table:default-cell-style-name="ce16"/>
        <table:table-column table:style-name="co61" table:default-cell-style-name="ce16"/>
        <table:table-column table:style-name="co27" table:default-cell-style-name="ce16"/>
        <table:table-column table:style-name="co10" table:default-cell-style-name="ce16"/>
        <table:table-column table:style-name="co62" table:default-cell-style-name="ce16"/>
        <table:table-column table:style-name="co63" table:default-cell-style-name="ce16"/>
        <table:table-column table:style-name="co27" table:default-cell-style-name="ce16"/>
        <table:table-column table:style-name="co64" table:default-cell-style-name="ce16"/>
        <table:table-column table:style-name="co62" table:default-cell-style-name="ce16"/>
        <table:table-column table:style-name="co65" table:default-cell-style-name="ce16"/>
        <table:table-column table:style-name="co4" table:default-cell-style-name="ce16"/>
        <table:table-column table:style-name="co66" table:default-cell-style-name="ce16"/>
        <table:table-column table:style-name="co4" table:number-columns-repeated="16372" table:default-cell-style-name="ce16"/>
        <table:table-row table:style-name="ro1">
          <table:table-cell table:number-columns-repeated="16384"/>
        </table:table-row>
        <table:table-row table:style-name="ro20">
          <table:table-cell/>
          <table:table-cell table:style-name="ce429" office:value-type="string" calcext:value-type="string" table:number-columns-spanned="3" table:number-rows-spanned="1">
            <text:p>EVALUACIÓN ECONÓMICA EN EMPRESA NO DIVERSIFICADA</text:p>
          </table:table-cell>
          <table:covered-table-cell table:style-name="ce434"/>
          <table:covered-table-cell table:style-name="ce445"/>
          <table:table-cell table:style-name="ce438"/>
          <table:table-cell table:style-name="ce429" office:value-type="string" calcext:value-type="string" table:number-columns-spanned="3" table:number-rows-spanned="1">
            <text:p>EVALUACIÓN ECONÓMICA EN EMPRESA DIVERSIFICADA</text:p>
          </table:table-cell>
          <table:covered-table-cell table:style-name="ce434"/>
          <table:covered-table-cell table:style-name="ce445"/>
          <table:table-cell table:style-name="ce438" table:number-columns-repeated="2"/>
          <table:table-cell table:number-columns-repeated="16374"/>
        </table:table-row>
        <table:table-row table:style-name="ro20">
          <table:table-cell table:style-name="ce419"/>
          <table:table-cell table:style-name="ce430" table:number-columns-repeated="3"/>
          <table:table-cell table:style-name="ce438"/>
          <table:table-cell table:style-name="ce430" table:number-columns-repeated="3"/>
          <table:table-cell table:style-name="ce438" table:number-columns-repeated="2"/>
          <table:table-cell table:number-columns-repeated="16374"/>
        </table:table-row>
        <table:table-row table:style-name="ro1">
          <table:table-cell table:style-name="ce419"/>
          <table:table-cell table:style-name="ce418" office:value-type="string" calcext:value-type="string">
            <text:p>Tasas y Criterios</text:p>
          </table:table-cell>
          <table:table-cell table:style-name="ce418" office:value-type="string" calcext:value-type="string">
            <text:p>Valor</text:p>
          </table:table-cell>
          <table:table-cell table:style-name="ce420"/>
          <table:table-cell table:style-name="ce419"/>
          <table:table-cell table:style-name="ce418" office:value-type="string" calcext:value-type="string">
            <text:p>Tasas y Criterios</text:p>
          </table:table-cell>
          <table:table-cell table:style-name="ce418" office:value-type="string" calcext:value-type="string">
            <text:p>Valor</text:p>
          </table:table-cell>
          <table:table-cell table:style-name="ce420"/>
          <table:table-cell table:style-name="ce419"/>
          <table:table-cell table:number-columns-repeated="16375"/>
        </table:table-row>
        <table:table-row table:style-name="ro1">
          <table:table-cell table:style-name="ce419"/>
          <table:table-cell table:style-name="ce419" office:value-type="string" calcext:value-type="string">
            <text:p>Kurt nominal en dólares</text:p>
          </table:table-cell>
          <table:table-cell table:style-name="ce435" table:formula="of:=+[$Ku.J12]" office:value-type="percentage" office:value="0.192079587205943" calcext:value-type="percentage">
            <text:p>19.21 %</text:p>
          </table:table-cell>
          <table:table-cell table:style-name="ce419" table:number-columns-repeated="2"/>
          <table:table-cell table:style-name="ce419" office:value-type="string" calcext:value-type="string">
            <text:p>Kurs nominal en dólares</text:p>
          </table:table-cell>
          <table:table-cell table:style-name="ce435" office:value-type="percentage" office:value="0.1099" calcext:value-type="percentage">
            <text:p>10.99 %</text:p>
          </table:table-cell>
          <table:table-cell table:style-name="ce419" table:number-columns-repeated="2"/>
          <table:table-cell table:number-columns-repeated="2"/>
          <table:table-cell office:value-type="string" calcext:value-type="string">
            <text:p>Kert nominal en dolares</text:p>
          </table:table-cell>
          <table:table-cell table:style-name="ce71" table:formula="of:=+[$'Ke y Wacc'.D11]" office:value-type="percentage" office:value="0.244282074669904" calcext:value-type="percentage">
            <text:p>24.43 %</text:p>
          </table:table-cell>
          <table:table-cell table:number-columns-repeated="16371"/>
        </table:table-row>
        <table:table-row table:style-name="ro1">
          <table:table-cell table:style-name="ce419"/>
          <table:table-cell table:style-name="ce419" office:value-type="string" calcext:value-type="string">
            <text:p>Kurt nominal en soles</text:p>
          </table:table-cell>
          <table:table-cell table:style-name="ce436" table:formula="of:=+[.C5]*(1+[.C7])/(1+[.C8])" office:value-type="percentage" office:value="0.193774407093054" calcext:value-type="percentage">
            <text:p>19.38 %</text:p>
          </table:table-cell>
          <table:table-cell table:style-name="ce419" table:number-columns-repeated="2"/>
          <table:table-cell table:style-name="ce419" office:value-type="string" calcext:value-type="string">
            <text:p>Kurs nominal en soles</text:p>
          </table:table-cell>
          <table:table-cell table:style-name="ce436" table:formula="of:=+[.G5]*(1+[.G7])/(1+[.G8])" office:value-type="percentage" office:value="0.110869705882353" calcext:value-type="percentage">
            <text:p>11.09 %</text:p>
          </table:table-cell>
          <table:table-cell table:style-name="ce419" table:number-columns-repeated="2"/>
          <table:table-cell table:number-columns-repeated="2"/>
          <table:table-cell office:value-type="string" calcext:value-type="string">
            <text:p>Kert nominal en soles</text:p>
          </table:table-cell>
          <table:table-cell table:style-name="ce450" table:formula="of:=+[.M5]*(1+[.M7])/(1+[.M8])" office:value-type="percentage" office:value="0.246437504740521" calcext:value-type="percentage">
            <text:p>25 %</text:p>
          </table:table-cell>
          <table:table-cell table:number-columns-repeated="16371"/>
        </table:table-row>
        <table:table-row table:style-name="ro1">
          <table:table-cell table:style-name="ce419"/>
          <table:table-cell table:style-name="ce419" office:value-type="string" calcext:value-type="string">
            <text:p>Inflacion Perú</text:p>
          </table:table-cell>
          <table:table-cell table:style-name="ce436" office:value-type="percentage" office:value="0.029" calcext:value-type="percentage">
            <text:p>2.90 %</text:p>
          </table:table-cell>
          <table:table-cell table:style-name="ce419" table:number-columns-repeated="2"/>
          <table:table-cell table:style-name="ce419" office:value-type="string" calcext:value-type="string">
            <text:p>Inflación en Perú</text:p>
          </table:table-cell>
          <table:table-cell table:style-name="ce436" office:value-type="percentage" office:value="0.029" calcext:value-type="percentage">
            <text:p>2.90 %</text:p>
          </table:table-cell>
          <table:table-cell table:style-name="ce419" table:number-columns-repeated="2"/>
          <table:table-cell table:number-columns-repeated="2"/>
          <table:table-cell office:value-type="string" calcext:value-type="string">
            <text:p>Inflacion en Perú</text:p>
          </table:table-cell>
          <table:table-cell table:style-name="ce450" office:value-type="percentage" office:value="0.029" calcext:value-type="percentage">
            <text:p>3 %</text:p>
          </table:table-cell>
          <table:table-cell table:number-columns-repeated="16371"/>
        </table:table-row>
        <table:table-row table:style-name="ro1">
          <table:table-cell table:style-name="ce419"/>
          <table:table-cell table:style-name="ce419" office:value-type="string" calcext:value-type="string">
            <text:p>Inflacion USA</text:p>
          </table:table-cell>
          <table:table-cell table:style-name="ce436" office:value-type="percentage" office:value="0.02" calcext:value-type="percentage">
            <text:p>2.00 %</text:p>
          </table:table-cell>
          <table:table-cell table:style-name="ce419" table:number-columns-repeated="2"/>
          <table:table-cell table:style-name="ce419" office:value-type="string" calcext:value-type="string">
            <text:p>Inflación USA</text:p>
          </table:table-cell>
          <table:table-cell table:style-name="ce436" office:value-type="percentage" office:value="0.02" calcext:value-type="percentage">
            <text:p>2.00 %</text:p>
          </table:table-cell>
          <table:table-cell table:style-name="ce419" table:number-columns-repeated="2"/>
          <table:table-cell table:number-columns-repeated="2"/>
          <table:table-cell office:value-type="string" calcext:value-type="string">
            <text:p>Inflacion USA</text:p>
          </table:table-cell>
          <table:table-cell table:style-name="ce450" office:value-type="percentage" office:value="0.02" calcext:value-type="percentage">
            <text:p>2 %</text:p>
          </table:table-cell>
          <table:table-cell table:number-columns-repeated="16371"/>
        </table:table-row>
        <table:table-row table:style-name="ro1">
          <table:table-cell table:style-name="ce419"/>
          <table:table-cell table:style-name="ce421" office:value-type="string" calcext:value-type="string">
            <text:p>Kurt <text:s/>real</text:p>
          </table:table-cell>
          <table:table-cell table:style-name="ce437" table:formula="of:=+((1+[.C6])/(1+[.C7]))-1" office:value-type="percentage" office:value="0.160130619138051" calcext:value-type="percentage">
            <text:p>16.01 %</text:p>
          </table:table-cell>
          <table:table-cell table:style-name="ce419" table:number-columns-repeated="2"/>
          <table:table-cell table:style-name="ce421" office:value-type="string" calcext:value-type="string">
            <text:p>Kurs <text:s/>real</text:p>
          </table:table-cell>
          <table:table-cell table:style-name="ce437" table:formula="of:=+((1+[.G6])/(1+[.G7]))-1" office:value-type="percentage" office:value="0.0795623963871264" calcext:value-type="percentage">
            <text:p>7.96 %</text:p>
          </table:table-cell>
          <table:table-cell table:style-name="ce419" table:number-columns-repeated="2"/>
          <table:table-cell table:number-columns-repeated="2"/>
          <table:table-cell table:style-name="ce449" office:value-type="string" calcext:value-type="string">
            <text:p>Kert <text:s/>real</text:p>
          </table:table-cell>
          <table:table-cell table:style-name="ce451" table:formula="of:=+(1+[.M6])/(1+[.M7]) -1" office:value-type="percentage" office:value="0.211309528416444" calcext:value-type="percentage">
            <text:p>21.13 %</text:p>
          </table:table-cell>
          <table:table-cell table:number-columns-repeated="16371"/>
        </table:table-row>
        <table:table-row table:style-name="ro1">
          <table:table-cell table:style-name="ce419" table:number-columns-repeated="2"/>
          <table:table-cell table:style-name="ce438"/>
          <table:table-cell table:style-name="ce419" table:number-columns-repeated="3"/>
          <table:table-cell table:style-name="ce438"/>
          <table:table-cell table:style-name="ce419" table:number-columns-repeated="2"/>
          <table:table-cell table:number-columns-repeated="16375"/>
        </table:table-row>
        <table:table-row table:style-name="ro1">
          <table:table-cell table:style-name="ce419"/>
          <table:table-cell table:style-name="ce431" office:value-type="string" calcext:value-type="string">
            <text:p>VANE =</text:p>
          </table:table-cell>
          <table:table-cell table:style-name="ce439" table:formula="of:=+NPV([.C9];[$'Flujo de caja'.D24:.M24])+[$'Flujo de caja'.C24]" office:value-type="float" office:value="316805.562538153" calcext:value-type="float">
            <text:p>316,806</text:p>
          </table:table-cell>
          <table:table-cell table:style-name="ce446" office:value-type="string" calcext:value-type="string">
            <text:p>soles</text:p>
          </table:table-cell>
          <table:table-cell table:style-name="ce419"/>
          <table:table-cell table:style-name="ce431" office:value-type="string" calcext:value-type="string">
            <text:p>VANE =</text:p>
          </table:table-cell>
          <table:table-cell table:style-name="ce439" table:formula="of:=NPV([.G9];[$'Flujo de caja'.D24:.M24])+[$'Flujo de caja'.C24]" office:value-type="float" office:value="888396.782834463" calcext:value-type="float">
            <text:p>888,397</text:p>
          </table:table-cell>
          <table:table-cell table:style-name="ce446" office:value-type="string" calcext:value-type="string">
            <text:p>soles</text:p>
          </table:table-cell>
          <table:table-cell table:style-name="ce419"/>
          <table:table-cell table:number-columns-repeated="16375"/>
        </table:table-row>
        <table:table-row table:style-name="ro1">
          <table:table-cell table:style-name="ce419"/>
          <table:table-cell table:style-name="ce432"/>
          <table:table-cell table:style-name="ce438"/>
          <table:table-cell table:style-name="ce419" table:number-columns-repeated="2"/>
          <table:table-cell table:style-name="ce432"/>
          <table:table-cell table:style-name="ce438"/>
          <table:table-cell table:style-name="ce419" table:number-columns-repeated="2"/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wacc nominal en dolares</text:p>
          </table:table-cell>
          <table:table-cell table:style-name="ce71" table:formula="of:=+[$'Ke y Wacc'.J12]" office:value-type="percentage" office:value="0.188855953732482" calcext:value-type="percentage">
            <text:p>18.89 %</text:p>
          </table:table-cell>
          <table:table-cell table:number-columns-repeated="16371"/>
        </table:table-row>
        <table:table-row table:style-name="ro1">
          <table:table-cell table:style-name="ce419"/>
          <table:table-cell table:style-name="ce431" office:value-type="string" calcext:value-type="string">
            <text:p>TIRE =</text:p>
          </table:table-cell>
          <table:table-cell table:style-name="ce440" table:formula="of:=+IRR([$'Flujo de caja'.C24:.M24])" office:value-type="percentage" office:value="0.238841809921468" calcext:value-type="percentage">
            <text:p>23.88 %</text:p>
          </table:table-cell>
          <table:table-cell table:style-name="ce446" office:value-type="string" calcext:value-type="string">
            <text:p>anual</text:p>
          </table:table-cell>
          <table:table-cell table:style-name="ce419"/>
          <table:table-cell table:style-name="ce431" office:value-type="string" calcext:value-type="string">
            <text:p>TIRE =</text:p>
          </table:table-cell>
          <table:table-cell table:style-name="ce440" table:formula="of:=IRR([$'Flujo de caja'.C24:.M24])" office:value-type="percentage" office:value="0.238841809921468" calcext:value-type="percentage">
            <text:p>23.88 %</text:p>
          </table:table-cell>
          <table:table-cell table:style-name="ce446" office:value-type="string" calcext:value-type="string">
            <text:p><text:s/>anual</text:p>
          </table:table-cell>
          <table:table-cell table:style-name="ce419"/>
          <table:table-cell table:number-columns-repeated="2"/>
          <table:table-cell office:value-type="string" calcext:value-type="string">
            <text:p>wacc nominal en soles</text:p>
          </table:table-cell>
          <table:table-cell table:style-name="ce93" table:formula="of:=+[.M12]*(1+[.M14])/(1+[.M15])" office:value-type="percentage" office:value="0.190522329794827" calcext:value-type="percentage">
            <text:p>19.05 %</text:p>
          </table:table-cell>
          <table:table-cell table:number-columns-repeated="16371"/>
        </table:table-row>
        <table:table-row table:style-name="ro1">
          <table:table-cell/>
          <table:table-cell table:style-name="ce433" table:number-columns-repeated="7"/>
          <table:table-cell table:number-columns-repeated="3"/>
          <table:table-cell office:value-type="string" calcext:value-type="string">
            <text:p>Inflacion en Perú</text:p>
          </table:table-cell>
          <table:table-cell table:style-name="ce407" office:value-type="percentage" office:value="0.029" calcext:value-type="percentage">
            <text:p>2.9%</text:p>
          </table:table-cell>
          <table:table-cell table:number-columns-repeated="16371"/>
        </table:table-row>
        <table:table-row table:style-name="ro21">
          <table:table-cell/>
          <table:table-cell table:style-name="ce429" office:value-type="string" calcext:value-type="string" table:number-columns-spanned="3" table:number-rows-spanned="1">
            <text:p>EVALUACIÓN FINANCIERA <text:s text:c="27"/>EN EMPRESA NO DIVERSIFICADA</text:p>
          </table:table-cell>
          <table:covered-table-cell table:style-name="ce434"/>
          <table:covered-table-cell table:style-name="ce445"/>
          <table:table-cell table:style-name="ce448"/>
          <table:table-cell table:style-name="ce429" office:value-type="string" calcext:value-type="string" table:number-columns-spanned="3" table:number-rows-spanned="1">
            <text:p>EVALUACIÓN FINANCIERA <text:s text:c="27"/>EN EMPRESA DIVERSIFICADA</text:p>
          </table:table-cell>
          <table:covered-table-cell table:style-name="ce434"/>
          <table:covered-table-cell table:style-name="ce445"/>
          <table:table-cell table:style-name="ce448"/>
          <table:table-cell table:number-columns-repeated="2"/>
          <table:table-cell office:value-type="string" calcext:value-type="string">
            <text:p>Inflacion USA</text:p>
          </table:table-cell>
          <table:table-cell table:style-name="ce450" office:value-type="percentage" office:value="0.02" calcext:value-type="percentage">
            <text:p>2 %</text:p>
          </table:table-cell>
          <table:table-cell table:number-columns-repeated="16371"/>
        </table:table-row>
        <table:table-row table:style-name="ro22">
          <table:table-cell table:style-name="ce419"/>
          <table:table-cell table:style-name="ce430" table:number-columns-repeated="3"/>
          <table:table-cell table:style-name="ce448"/>
          <table:table-cell table:style-name="ce430" table:number-columns-repeated="3"/>
          <table:table-cell table:style-name="ce448"/>
          <table:table-cell table:number-columns-repeated="3"/>
          <table:table-cell table:style-name="ce450"/>
          <table:table-cell table:number-columns-repeated="16371"/>
        </table:table-row>
        <table:table-row table:style-name="ro1">
          <table:table-cell table:style-name="ce419"/>
          <table:table-cell table:style-name="ce418" office:value-type="string" calcext:value-type="string">
            <text:p>Tasas y Criterios</text:p>
          </table:table-cell>
          <table:table-cell table:style-name="ce418" office:value-type="string" calcext:value-type="string">
            <text:p>Valor</text:p>
          </table:table-cell>
          <table:table-cell table:style-name="ce446"/>
          <table:table-cell table:style-name="ce419"/>
          <table:table-cell table:style-name="ce418" office:value-type="string" calcext:value-type="string">
            <text:p>Tasas y Criterios</text:p>
          </table:table-cell>
          <table:table-cell table:style-name="ce418" office:value-type="string" calcext:value-type="string">
            <text:p>Valor</text:p>
          </table:table-cell>
          <table:table-cell table:style-name="ce446"/>
          <table:table-cell table:style-name="ce419"/>
          <table:table-cell table:number-columns-repeated="2"/>
          <table:table-cell table:style-name="ce449" office:value-type="string" calcext:value-type="string">
            <text:p>Wacc <text:s/>real</text:p>
          </table:table-cell>
          <table:table-cell table:style-name="ce451" table:formula="of:=+(1+[.M13])/(1+[.M14]) -1" office:value-type="percentage" office:value="0.156970194164069" calcext:value-type="percentage">
            <text:p>15.70 %</text:p>
          </table:table-cell>
          <table:table-cell table:number-columns-repeated="16371"/>
        </table:table-row>
        <table:table-row table:style-name="ro1">
          <table:table-cell table:style-name="ce419"/>
          <table:table-cell table:style-name="ce419" office:value-type="string" calcext:value-type="string">
            <text:p>TEA nominal</text:p>
          </table:table-cell>
          <table:table-cell table:style-name="ce441" table:formula="of:=+(1+[$Financiamiento.C2])^12 -1" office:value-type="percentage" office:value="0.1343" calcext:value-type="percentage">
            <text:p>13.4%</text:p>
          </table:table-cell>
          <table:table-cell table:style-name="ce419" table:number-columns-repeated="2"/>
          <table:table-cell table:style-name="ce419" office:value-type="string" calcext:value-type="string">
            <text:p>TEA nominal</text:p>
          </table:table-cell>
          <table:table-cell table:style-name="ce441" table:formula="of:=[.C18]" office:value-type="percentage" office:value="0.1343" calcext:value-type="percentage">
            <text:p>13.4%</text:p>
          </table:table-cell>
          <table:table-cell table:style-name="ce419" table:number-columns-repeated="2"/>
          <table:table-cell table:number-columns-repeated="16375"/>
        </table:table-row>
        <table:table-row table:style-name="ro1">
          <table:table-cell table:style-name="ce419"/>
          <table:table-cell table:style-name="ce419" office:value-type="string" calcext:value-type="string">
            <text:p>TEA real</text:p>
          </table:table-cell>
          <table:table-cell table:style-name="ce441" table:formula="of:=+(1+[.C18])/(1+[.C7]) -1" office:value-type="percentage" office:value="0.102332361516035" calcext:value-type="percentage">
            <text:p>10.2%</text:p>
          </table:table-cell>
          <table:table-cell table:style-name="ce419" table:number-columns-repeated="2"/>
          <table:table-cell table:style-name="ce419" office:value-type="string" calcext:value-type="string">
            <text:p>TEA real</text:p>
          </table:table-cell>
          <table:table-cell table:style-name="ce441" table:formula="of:=+(1+[.G18])/(1+[.G7]) -1" office:value-type="percentage" office:value="0.102332361516035" calcext:value-type="percentage">
            <text:p>10.2%</text:p>
          </table:table-cell>
          <table:table-cell table:style-name="ce419" table:number-columns-repeated="2"/>
          <table:table-cell table:number-columns-repeated="16375"/>
        </table:table-row>
        <table:table-row table:style-name="ro1">
          <table:table-cell table:style-name="ce419" table:number-columns-repeated="2"/>
          <table:table-cell table:style-name="ce438"/>
          <table:table-cell table:style-name="ce419" table:number-columns-repeated="3"/>
          <table:table-cell table:style-name="ce438"/>
          <table:table-cell table:style-name="ce419" table:number-columns-repeated="2"/>
          <table:table-cell table:number-columns-repeated="16375"/>
        </table:table-row>
        <table:table-row table:style-name="ro1">
          <table:table-cell table:style-name="ce419"/>
          <table:table-cell table:style-name="ce419" office:value-type="string" calcext:value-type="string">
            <text:p>VAEFI =</text:p>
          </table:table-cell>
          <table:table-cell table:style-name="ce442" table:formula="of:=+NPV([.C19];[$'Flujo de caja'.D28:.M28])" office:value-type="float" office:value="40585.5217551601" calcext:value-type="float">
            <text:p>S/ 40,586</text:p>
          </table:table-cell>
          <table:table-cell table:style-name="ce419" table:number-columns-repeated="2"/>
          <table:table-cell table:style-name="ce419" office:value-type="string" calcext:value-type="string">
            <text:p>VAEFI =</text:p>
          </table:table-cell>
          <table:table-cell table:style-name="ce442" table:formula="of:=NPV([.G19];[$'Flujo de caja'.D28:.M28])" office:value-type="float" office:value="40585.5217551601" calcext:value-type="float">
            <text:p>S/ 40,586</text:p>
          </table:table-cell>
          <table:table-cell table:style-name="ce419" table:number-columns-repeated="2"/>
          <table:table-cell table:number-columns-repeated="16375"/>
        </table:table-row>
        <table:table-row table:style-name="ro1">
          <table:table-cell table:style-name="ce419" table:number-columns-repeated="2"/>
          <table:table-cell table:style-name="ce438"/>
          <table:table-cell table:style-name="ce419" table:number-columns-repeated="3"/>
          <table:table-cell table:style-name="ce438"/>
          <table:table-cell table:style-name="ce419" table:number-columns-repeated="2"/>
          <table:table-cell table:number-columns-repeated="16375"/>
        </table:table-row>
        <table:table-row table:style-name="ro1">
          <table:table-cell table:style-name="ce419"/>
          <table:table-cell table:style-name="ce431" office:value-type="string" calcext:value-type="string">
            <text:p>VPN Ajustado = VANF =</text:p>
          </table:table-cell>
          <table:table-cell table:style-name="ce443" table:formula="of:=+[.C11]+[.C21]" office:value-type="float" office:value="504085.186566147" calcext:value-type="float">
            <text:p>S/ 504,085</text:p>
          </table:table-cell>
          <table:table-cell table:style-name="ce446" office:value-type="string" calcext:value-type="string">
            <text:p>soles</text:p>
          </table:table-cell>
          <table:table-cell table:style-name="ce419"/>
          <table:table-cell table:style-name="ce431" office:value-type="string" calcext:value-type="string">
            <text:p>VPN Ajustado = VANF =</text:p>
          </table:table-cell>
          <table:table-cell table:style-name="ce443" table:formula="of:=+[.G11]+[.G21]" office:value-type="float" office:value="928982.304589623" calcext:value-type="float">
            <text:p>S/ 928,982</text:p>
          </table:table-cell>
          <table:table-cell table:style-name="ce446" office:value-type="string" calcext:value-type="string">
            <text:p>soles</text:p>
          </table:table-cell>
          <table:table-cell table:style-name="ce419"/>
          <table:table-cell table:number-columns-repeated="16375"/>
        </table:table-row>
        <table:table-row table:style-name="ro1">
          <table:table-cell table:style-name="ce419"/>
          <table:table-cell table:style-name="ce432"/>
          <table:table-cell table:style-name="ce438"/>
          <table:table-cell table:style-name="ce419" table:number-columns-repeated="2"/>
          <table:table-cell table:style-name="ce432"/>
          <table:table-cell table:style-name="ce438"/>
          <table:table-cell table:style-name="ce419" table:number-columns-repeated="2"/>
          <table:table-cell table:number-columns-repeated="16375"/>
        </table:table-row>
        <table:table-row table:style-name="ro1">
          <table:table-cell table:style-name="ce419"/>
          <table:table-cell table:style-name="ce431" office:value-type="string" calcext:value-type="string">
            <text:p>TIRF Ajustado =</text:p>
          </table:table-cell>
          <table:table-cell table:style-name="ce440" table:formula="of:=+IRR([$'Flujo de caja'.C32:.M32])" office:value-type="percentage" office:value="0.282726593166351" calcext:value-type="percentage">
            <text:p>28.27 %</text:p>
          </table:table-cell>
          <table:table-cell table:style-name="ce446" office:value-type="string" calcext:value-type="string">
            <text:p><text:s/>anual</text:p>
          </table:table-cell>
          <table:table-cell table:style-name="ce419"/>
          <table:table-cell table:style-name="ce431" office:value-type="string" calcext:value-type="string">
            <text:p>TIRF Ajustado =</text:p>
          </table:table-cell>
          <table:table-cell table:style-name="ce440" table:formula="of:=IRR([$'Flujo de caja'.C32:.M32])" office:value-type="percentage" office:value="0.282726593166351" calcext:value-type="percentage">
            <text:p>28.27 %</text:p>
          </table:table-cell>
          <table:table-cell table:style-name="ce446" office:value-type="string" calcext:value-type="string">
            <text:p>anual</text:p>
          </table:table-cell>
          <table:table-cell table:style-name="ce419"/>
          <table:table-cell table:number-columns-repeated="16375"/>
        </table:table-row>
        <table:table-row table:style-name="ro1">
          <table:table-cell table:style-name="ce419" table:number-columns-repeated="9"/>
          <table:table-cell table:number-columns-repeated="16375"/>
        </table:table-row>
        <table:table-row table:style-name="ro1">
          <table:table-cell/>
          <table:table-cell table:style-name="ce204" office:value-type="string" calcext:value-type="string">
            <text:p>PERIODO DE RECUPERO DE LA INVERSIÓN( A VALOR PRESENTE)</text:p>
          </table:table-cell>
          <table:table-cell table:style-name="ce204" table:number-columns-repeated="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FCE</text:p>
          </table:table-cell>
          <table:table-cell office:value-type="string" calcext:value-type="string">
            <text:p>FCE Descontado</text:p>
          </table:table-cell>
          <table:table-cell table:number-columns-repeated="5"/>
          <table:table-cell office:value-type="string" calcext:value-type="string">
            <text:p>FCED acumulado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70" table:formula="of:=+[$'Flujo de caja'.C24]" office:value-type="float" office:value="-830354.963085712" calcext:value-type="float">
            <text:p>-830,355</text:p>
          </table:table-cell>
          <table:table-cell table:style-name="ce182" table:formula="of:=+[.C30]*(1+[.$C$9])^-[.B30]" office:value-type="float" office:value="-830354.963085712" calcext:value-type="float">
            <text:p>-830354.96</text:p>
          </table:table-cell>
          <table:table-cell table:style-name="ce182" table:number-columns-repeated="5"/>
          <table:table-cell table:number-columns-repeated="1637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70" table:formula="of:=+[$'Flujo de caja'.D24]" office:value-type="float" office:value="197508.333489302" calcext:value-type="float">
            <text:p>197,508</text:p>
          </table:table-cell>
          <table:table-cell table:style-name="ce182" table:formula="of:=+[.C31]*(1+[.$C$9])^-[.B31]" office:value-type="float" office:value="170246.634500558" calcext:value-type="float">
            <text:p>170246.63</text:p>
          </table:table-cell>
          <table:table-cell table:style-name="ce182" table:number-columns-repeated="5"/>
          <table:table-cell table:style-name="ce182" table:formula="of:=+[.D31]" office:value-type="float" office:value="170246.634500558" calcext:value-type="float">
            <text:p>170246.6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0" table:formula="of:=+[$'Flujo de caja'.E24]" office:value-type="float" office:value="208421.961324758" calcext:value-type="float">
            <text:p>208,422</text:p>
          </table:table-cell>
          <table:table-cell table:style-name="ce182" table:formula="of:=+[.C32]*(1+[.$C$9])^-[.B32]" office:value-type="float" office:value="154856.592968342" calcext:value-type="float">
            <text:p>154856.59</text:p>
          </table:table-cell>
          <table:table-cell table:style-name="ce182" table:number-columns-repeated="5"/>
          <table:table-cell table:style-name="ce182" table:formula="of:=+[.J31]+[.D32]" office:value-type="float" office:value="325103.227468901" calcext:value-type="float">
            <text:p>325103.2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70" table:formula="of:=+[$'Flujo de caja'.F24]" office:value-type="float" office:value="158742.742814725" calcext:value-type="float">
            <text:p>158,743</text:p>
          </table:table-cell>
          <table:table-cell table:style-name="ce182" table:formula="of:=+[.C33]*(1+[.$C$9])^-[.B33]" office:value-type="float" office:value="101665.409035697" calcext:value-type="float">
            <text:p>101665.41</text:p>
          </table:table-cell>
          <table:table-cell table:style-name="ce182" table:number-columns-repeated="5"/>
          <table:table-cell table:style-name="ce182" table:formula="of:=+[.J32]+[.D33]" office:value-type="float" office:value="426768.636504597" calcext:value-type="float">
            <text:p>426768.6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70" table:formula="of:=+[$'Flujo de caja'.G24]" office:value-type="float" office:value="188433.309206977" calcext:value-type="float">
            <text:p>188,433</text:p>
          </table:table-cell>
          <table:table-cell table:style-name="ce182" table:formula="of:=+[.C34]*(1+[.$C$9])^-[.B34]" office:value-type="float" office:value="104023.178139833" calcext:value-type="float">
            <text:p>104023.18</text:p>
          </table:table-cell>
          <table:table-cell table:style-name="ce182" table:number-columns-repeated="5"/>
          <table:table-cell table:style-name="ce182" table:formula="of:=+[.J33]+[.D34]" office:value-type="float" office:value="530791.814644431" calcext:value-type="float">
            <text:p>530791.8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70" table:formula="of:=+[$'Flujo de caja'.H24]" office:value-type="float" office:value="206538.668278158" calcext:value-type="float">
            <text:p>206,539</text:p>
          </table:table-cell>
          <table:table-cell table:style-name="ce182" table:formula="of:=+[.C35]*(1+[.$C$9])^-[.B35]" office:value-type="float" office:value="98280.4024948559" calcext:value-type="float">
            <text:p>98280.40</text:p>
          </table:table-cell>
          <table:table-cell table:style-name="ce182" table:number-columns-repeated="5"/>
          <table:table-cell table:style-name="ce182" table:formula="of:=+[.J34]+[.D35]" office:value-type="float" office:value="629072.217139287" calcext:value-type="float">
            <text:p>629072.22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70" table:formula="of:=+[$'Flujo de caja'.I24]" office:value-type="float" office:value="222978.423278331" calcext:value-type="float">
            <text:p>222,978</text:p>
          </table:table-cell>
          <table:table-cell table:style-name="ce182" table:formula="of:=+[.C36]*(1+[.$C$9])^-[.B36]" office:value-type="float" office:value="91457.9589139701" calcext:value-type="float">
            <text:p>91457.96</text:p>
          </table:table-cell>
          <table:table-cell table:style-name="ce182" table:number-columns-repeated="5"/>
          <table:table-cell table:style-name="ce182" table:formula="of:=+[.J35]+[.D36]" office:value-type="float" office:value="720530.176053257" calcext:value-type="float">
            <text:p>720530.18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70" table:formula="of:=+[$'Flujo de caja'.J24]" office:value-type="float" office:value="240531.810387621" calcext:value-type="float">
            <text:p>240,532</text:p>
          </table:table-cell>
          <table:table-cell table:style-name="ce182" table:formula="of:=+[.C37]*(1+[.$C$9])^-[.B37]" office:value-type="float" office:value="85040.2044448716" calcext:value-type="float">
            <text:p>85040.20</text:p>
          </table:table-cell>
          <table:table-cell table:style-name="ce182" table:number-columns-repeated="5"/>
          <table:table-cell table:style-name="ce182" table:formula="of:=+[.J36]+[.D37]" office:value-type="float" office:value="805570.380498128" calcext:value-type="float">
            <text:p>805570.38</text:p>
          </table:table-cell>
          <table:table-cell table:number-columns-repeated="16374"/>
        </table:table-row>
        <table:table-row table:style-name="ro1">
          <table:table-cell/>
          <table:table-cell table:style-name="ce94" office:value-type="float" office:value="8" calcext:value-type="float">
            <text:p>8</text:p>
          </table:table-cell>
          <table:table-cell table:style-name="ce444" table:formula="of:=+[$'Flujo de caja'.K24]" office:value-type="float" office:value="256569.330675149" calcext:value-type="float">
            <text:p>256,569</text:p>
          </table:table-cell>
          <table:table-cell table:style-name="ce447" table:formula="of:=+[.C38]*(1+[.$C$9])^-[.B38]" office:value-type="float" office:value="78189.7145371862" calcext:value-type="float">
            <text:p>78189.71</text:p>
          </table:table-cell>
          <table:table-cell table:style-name="ce447" table:number-columns-repeated="5"/>
          <table:table-cell table:style-name="ce447" table:formula="of:=+[.J37]+[.D38]" office:value-type="float" office:value="883760.095035314" calcext:value-type="float">
            <text:p>883760.1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70" table:formula="of:=+[$'Flujo de caja'.L24]" office:value-type="float" office:value="279303.065423274" calcext:value-type="float">
            <text:p>279,303</text:p>
          </table:table-cell>
          <table:table-cell table:style-name="ce182" table:formula="of:=+[.C39]*(1+[.$C$9])^-[.B39]" office:value-type="float" office:value="73369.1857578453" calcext:value-type="float">
            <text:p>73369.19</text:p>
          </table:table-cell>
          <table:table-cell table:style-name="ce182" table:number-columns-repeated="5"/>
          <table:table-cell table:style-name="ce182" table:formula="of:=+[.J38]+[.D39]" office:value-type="float" office:value="957129.28079316" calcext:value-type="float">
            <text:p>957129.28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70" table:formula="of:=+[$'Flujo de caja'.M24]" office:value-type="float" office:value="839254.938246046" calcext:value-type="float">
            <text:p>839,255</text:p>
          </table:table-cell>
          <table:table-cell table:style-name="ce182" table:formula="of:=+[.C40]*(1+[.$C$9])^-[.B40]" office:value-type="float" office:value="190031.244830706" calcext:value-type="float">
            <text:p>190031.24</text:p>
          </table:table-cell>
          <table:table-cell table:style-name="ce182" table:number-columns-repeated="5"/>
          <table:table-cell table:style-name="ce182" table:formula="of:=+[.J39]+[.D40]" office:value-type="float" office:value="1147160.52562387" calcext:value-type="float">
            <text:p>1147160.53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182" table:number-columns-repeated="6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ños</text:p>
          </table:table-cell>
          <table:table-cell table:formula="of:=+[.B36]+(-[.D30]-[.J36])/[.D37]" office:value-type="float" office:value="7.29144547275461" calcext:value-type="float">
            <text:p>7.29144547275461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meses</text:p>
          </table:table-cell>
          <table:table-cell table:formula="of:=+([.C43]-7)*12" office:value-type="float" office:value="3.49734567305532" calcext:value-type="float">
            <text:p>3.49734567305532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dias</text:p>
          </table:table-cell>
          <table:table-cell table:formula="of:=+([.C44]-9)*30" office:value-type="float" office:value="-165.07962980834" calcext:value-type="float">
            <text:p>-165.0796298083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i</text:p>
          </table:table-cell>
          <table:table-cell office:value-type="string" calcext:value-type="string">
            <text:p>7 años con 9 meses y 13 días.</text:p>
          </table:table-cell>
          <table:table-cell table:number-columns-repeated="16381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expression table:name="Precio_Materia_Prima" table:base-cell-address="$'Resumen del escenario 2'.$A$1" table:expression="#REF!"/>
        <table:named-expression table:name="Precio_Queso_Maduro" table:base-cell-address="$'Resumen del escenario 2'.$A$1" table:expression="#REF!"/>
        <table:named-expression table:name="Precio_retablo_unidad" table:base-cell-address="$'Resumen del escenario 2'.$A$1" table:expression="#REF!"/>
        <table:named-expression table:name="TIRE" table:base-cell-address="$'Resumen del escenario 2'.$A$1" table:expression="#REF!"/>
        <table:named-expression table:name="TIRF" table:base-cell-address="$'Resumen del escenario 2'.$A$1" table:expression="#REF!"/>
        <table:named-expression table:name="VANE" table:base-cell-address="$'Resumen del escenario 2'.$A$1" table:expression="#REF!"/>
        <table:named-expression table:name="VANF" table:base-cell-address="$'Resumen del escenario 2'.$A$1" table:expression="#REF!"/>
        <table:named-expression table:name="VENCII" table:base-cell-address="$'Resumen del escenario 2'.$A$1" table:expression="['file://Si04_89/ajorge/WINDOWS/TEMP/PPTTvelasco.xls'#$CRONOGRAMA.$C$83:.$D$452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>S/ </number:text>
      <number:number number:decimal-places="2" number:min-decimal-places="2" number:min-integer-digits="1" number:grouping="true"/>
    </number:number-style>
    <number:number-style style:name="N133">
      <style:text-properties fo:color="#ff0000"/>
      <number:text>-S/ 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">
      <number:number number:decimal-places="4" number:min-decimal-places="4" number:min-integer-digits="1"/>
    </number:number-style>
    <number:percentage-style style:name="N135">
      <number:number number:decimal-places="1" number:min-decimal-places="1" number:min-integer-digits="1"/>
      <number:text>%</number:text>
    </number:percentage-style>
    <number:number-style style:name="N136">
      <number:number number:decimal-places="1" number:min-decimal-places="1" number:min-integer-digits="1"/>
    </number:number-style>
    <number:currency-style style:name="N137">
      <number:currency-symbol number:language="es" number:country="PE">S/.</number:currency-symbol>
      <number:text> </number:text>
      <number:number number:decimal-places="2" number:min-decimal-places="2" number:min-integer-digits="1" number:grouping="true"/>
    </number:currency-style>
    <number:percentage-style style:name="N138">
      <number:number number:decimal-places="16" number:min-decimal-places="16" number:min-integer-digits="1"/>
      <number:text>%</number:text>
    </number:percentage-style>
    <number:number-style style:name="N139">
      <number:number number:decimal-places="3" number:min-decimal-places="3" number:min-integer-digits="1"/>
    </number:number-style>
    <number:number-style style:name="N140P0" style:volatile="true">
      <number:text>S/ </number:text>
      <number:number number:decimal-places="1" number:min-decimal-places="1" number:min-integer-digits="1" number:grouping="true"/>
    </number:number-style>
    <number:number-style style:name="N140">
      <style:text-properties fo:color="#ff0000"/>
      <number:text>-S/ </number:text>
      <number:number number:decimal-places="1" number:min-decimal-places="1" number:min-integer-digits="1" number:grouping="true"/>
      <style:map style:condition="value()&gt;=0" style:apply-style-name="N140P0"/>
    </number:number-style>
    <number:number-style style:name="N141">
      <number:number number:decimal-places="1" number:min-decimal-places="1" number:min-integer-digits="1" number:grouping="true"/>
    </number:number-style>
    <number:percentage-style style:name="N142">
      <number:number number:decimal-places="10" number:min-decimal-places="10" number:min-integer-digits="1"/>
      <number:text>%</number:text>
    </number:percentage-style>
    <number:number-style style:name="N143">
      <number:number number:decimal-places="14" number:min-decimal-places="14" number:min-integer-digits="1"/>
    </number:number-style>
    <number:number-style style:name="N144P0" style:volatile="true">
      <number:text>S/ 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-S/ </number:text>
      <number:number number:decimal-places="0" number:min-decimal-places="0" number:min-integer-digits="1" number:grouping="true"/>
      <style:map style:condition="value()&gt;=0" style:apply-style-name="N144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rcentaje_20_2" style:display-name="Porcentaje 2" style:family="table-cell" style:parent-style-name="Default" style:data-style-name="N10"/>
    <style:style style:name="Excel_20_Built-in_20_Percent" style:display-name="Excel Built-in Percent" style:family="table-cell" style:parent-style-name="Default" style:data-style-name="N10"/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/>
    </style:style>
    <style:style style:name="ConditionalStyle_5f_8" style:display-name="ConditionalStyle_8" style:family="table-cell" style:parent-style-name="Default">
      <style:table-cell-properties fo:background-color="#ffc7ce"/>
      <style:text-properties fo:color="#9c0006"/>
    </style:style>
    <style:style style:name="ConditionalStyle_5f_9" style:display-name="ConditionalStyle_9" style:family="table-cell" style:parent-style-name="Default">
      <style:table-cell-properties fo:background-color="#ffc7ce"/>
      <style:text-properties fo:color="#9c0006"/>
    </style:style>
    <style:style style:name="ConditionalStyle_5f_10" style:display-name="ConditionalStyle_10" style:family="table-cell" style:parent-style-name="Default">
      <style:table-cell-properties fo:background-color="#ffc7ce"/>
      <style:text-properties fo:color="#9c0006"/>
    </style:style>
    <style:style style:name="ConditionalStyle_5f_11" style:display-name="ConditionalStyle_11" style:family="table-cell" style:parent-style-name="Default">
      <style:table-cell-properties fo:background-color="#ffc7ce"/>
      <style:text-properties fo:color="#9c0006"/>
    </style:style>
    <style:style style:name="ConditionalStyle_5f_12" style:display-name="ConditionalStyle_12" style:family="table-cell" style:parent-style-name="Default">
      <style:table-cell-properties fo:background-color="#ffc7ce"/>
      <style:text-properties fo:color="#9c0006"/>
    </style:style>
    <style:style style:name="ConditionalStyle_5f_13" style:display-name="ConditionalStyle_13" style:family="table-cell" style:parent-style-name="Default">
      <style:table-cell-properties fo:background-color="#ffc7ce"/>
      <style:text-properties fo:color="#9c0006"/>
    </style:style>
    <style:style style:name="ConditionalStyle_5f_14" style:display-name="ConditionalStyle_14" style:family="table-cell" style:parent-style-name="Default">
      <style:table-cell-properties fo:background-color="#ffc7ce"/>
      <style:text-properties fo:color="#9c0006"/>
    </style:style>
    <style:style style:name="ConditionalStyle_5f_15" style:display-name="ConditionalStyle_15" style:family="table-cell" style:parent-style-name="Default">
      <style:table-cell-properties fo:background-color="#ffc7ce"/>
      <style:text-properties fo:color="#9c0006"/>
    </style:style>
    <style:style style:name="ConditionalStyle_5f_16" style:display-name="ConditionalStyle_16" style:family="table-cell" style:parent-style-name="Default">
      <style:table-cell-properties fo:background-color="#ffc7ce"/>
      <style:text-properties fo:color="#9c0006"/>
    </style:style>
    <style:style style:name="ConditionalStyle_5f_17" style:display-name="ConditionalStyle_17" style:family="table-cell" style:parent-style-name="Default">
      <style:table-cell-properties fo:background-color="#ffc7ce"/>
      <style:text-properties fo:color="#9c0006"/>
    </style:style>
    <style:style style:name="ConditionalStyle_5f_18" style:display-name="ConditionalStyle_18" style:family="table-cell" style:parent-style-name="Default">
      <style:table-cell-properties fo:background-color="#ffc7ce"/>
      <style:text-properties fo:color="#9c0006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sumen" style:display-name="PageStyle_Resum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stos_20_Ventas" style:display-name="PageStyle_Costos Venta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preciación_20_y_20_VR" style:display-name="PageStyle_Depreciación y V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versión_20_inicial" style:display-name="PageStyle_Inversión inicial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pital_5f_Trabajo" style:display-name="PageStyle_Capital_Trabaj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_20_del_20_escenario_20_2" style:display-name="PageStyle_Resumen del escenario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álisis_20_de_20_sensibilidad" style:display-name="PageStyle_Análisis de sensibilidad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supuesto_20_de_20_ventas" style:display-name="PageStyle_Presupuesto de ven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eldos" style:display-name="PageStyle_Sueldos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stos_5f_Operativos" style:display-name="PageStyle_Gastos_Operativ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stos_20_unitarios" style:display-name="PageStyle_Costos unitari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inanciamiento" style:display-name="PageStyle_Financiamient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tado_20_de_20_resultados" style:display-name="PageStyle_Estado de resultado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u" style:display-name="PageStyle_Ku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lujo_20_de_20_caja" style:display-name="PageStyle_Flujo de caj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unto_20_de_20_equilibrio" style:display-name="PageStyle_Punto de equilibr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_20_y_20_Wacc" style:display-name="PageStyle_Ke y Wa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ntabilidad" style:display-name="PageStyle_Rentabilida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SUS</meta:initial-creator>
    <dc:creator>Usuario</dc:creator>
    <meta:creation-date>2021-02-21T15:23:08</meta:creation-date>
    <dc:date>2021-07-02T20:17:32</dc:date>
    <meta:generator>LibreOffice/24.2.4.2$Linux_X86_64 LibreOffice_project/420$Build-2</meta:generator>
    <meta:document-statistic meta:table-count="21" meta:cell-count="7693" meta:object-count="4"/>
    <meta:user-defined meta:name="AppVersion">16.0300</meta:user-defined>
  </office:meta>
</office:document-meta>
</file>