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10.26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0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22a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color="#222a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>
          <loext:transformation loext:type="lummod" loext:value="5000"/>
        </loext:char-complex-color>
      </style:text-properties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a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ce17" style:family="table-cell" style:parent-style-name="Default">
      <style:table-cell-properties style:diagonal-bl-tr="none" style:diagonal-tl-br="none" fo:background-color="transparent" fo:border="none" style:rotation-align="none"/>
      <style:text-properties fo:color="#222a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22a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22a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>
          <loext:transformation loext:type="lummod" loext:value="5000"/>
        </loext:char-complex-color>
      </style:text-properties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ce30"/>
        <table:table-column table:style-name="co4" table:number-columns-repeated="16381" table:default-cell-style-name="ce42"/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EQUIPOS DE TRABAJO - <text:s/>EVALUACIÓN PRIVADA DE PROYECTOS</text:p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31"/>
          <table:table-cell table:number-columns-repeated="16381"/>
        </table:table-row>
        <table:table-row table:style-name="ro2">
          <table:table-cell/>
          <table:table-cell table:style-name="ce12" office:value-type="string" calcext:value-type="string">
            <text:p>NOMBRE DEL EQUIPO: BÚHO</text:p>
          </table:table-cell>
          <table:table-cell table:style-name="ce31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3" office:value-type="string" calcext:value-type="string">
            <text:p>Verdu-chips<text:span text:style-name="T1"> CASO 20</text:span></text:p>
          </table:table-cell>
          <table:table-cell table:style-name="ce32"/>
          <table:table-cell table:number-columns-repeated="1638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ARGUMEDO PRADO, Marilin Yesabella (SCRUM MASTER)</text:p>
          </table:table-cell>
          <table:table-cell table:style-name="ce32"/>
          <table:table-cell table:number-columns-repeated="1638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CASTRO CAMPOS, Placido</text:p>
          </table:table-cell>
          <table:table-cell table:style-name="ce33"/>
          <table:table-cell table:number-columns-repeated="1638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CHOCCE AGUILAR, Semni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GUZMAN TORRE, Benjy Danner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FLORES SULCA, Carlos Alberto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/>
          <table:table-cell table:style-name="ce14"/>
          <table:table-cell table:style-name="ce31"/>
          <table:table-cell table:number-columns-repeated="16381"/>
        </table:table-row>
        <table:table-row table:style-name="ro2">
          <table:table-cell table:style-name="ce5"/>
          <table:table-cell table:style-name="ce15"/>
          <table:table-cell table:style-name="ce31"/>
          <table:table-cell table:number-columns-repeated="16381"/>
        </table:table-row>
        <table:table-row table:style-name="ro2">
          <table:table-cell table:style-name="ce5"/>
          <table:table-cell table:style-name="ce12" office:value-type="string" calcext:value-type="string">
            <text:p>NOMBRE DEL EQUIPO: EVIL ECONOMIST</text:p>
          </table:table-cell>
          <table:table-cell table:style-name="ce31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3" office:value-type="string" calcext:value-type="string">
            <text:p>Macetas y estructuras de tensegridad  en madera <text:span text:style-name="T1">CASO 19</text:span></text:p>
          </table:table-cell>
          <table:table-cell table:style-name="ce34"/>
          <table:table-cell table:number-columns-repeated="1638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AYALA SOTO, Angie Rocio </text:p>
          </table:table-cell>
          <table:table-cell table:style-name="ce34"/>
          <table:table-cell table:number-columns-repeated="1638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EVANÁN ORTIZ, Marleny</text:p>
          </table:table-cell>
          <table:table-cell table:style-name="ce34"/>
          <table:table-cell table:number-columns-repeated="1638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UAYHUA PALOMINO, Samuel (SCRUM MASTER)</text:p>
          </table:table-cell>
          <table:table-cell table:style-name="ce34"/>
          <table:table-cell table:number-columns-repeated="1638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LLACTAHUAMÁN AQUINO, Jober Joel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7" office:value-type="string" calcext:value-type="string">
            <text:p>MENDOZA HUAMANÍ, Jean</text:p>
          </table:table-cell>
          <table:table-cell table:style-name="ce31"/>
          <table:table-cell table:number-columns-repeated="16381"/>
        </table:table-row>
        <table:table-row table:style-name="ro2" table:number-rows-repeated="2">
          <table:table-cell table:style-name="ce4"/>
          <table:table-cell table:style-name="ce17"/>
          <table:table-cell table:style-name="ce31"/>
          <table:table-cell table:number-columns-repeated="16381"/>
        </table:table-row>
        <table:table-row table:style-name="ro2">
          <table:table-cell table:style-name="ce4"/>
          <table:table-cell table:style-name="ce12" office:value-type="string" calcext:value-type="string">
            <text:p>NOMBRE DEL EQUIPO: CHASKA ÑAWI</text:p>
          </table:table-cell>
          <table:table-cell table:style-name="ce31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8" office:value-type="string" calcext:value-type="string">
            <text:p>Dango -  acompañamiento de servicio de regalos                  <text:span text:style-name="T2">CASO 18</text:span>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LLENDE LEGUÍA, Rómulo Randy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ARDENAS PAREDES, Cesar Eduardo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GALINDO RUIZ, Jhon Handerson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UARANCCA YAÑE, Luis Stalin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VILLA NAVARRO, Sonia Mayel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/>
          <table:table-cell/>
          <table:table-cell table:style-name="ce31"/>
          <table:table-cell table:number-columns-repeated="16381"/>
        </table:table-row>
        <table:table-row table:style-name="ro2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/>
          <table:table-cell table:style-name="ce12" office:value-type="string" calcext:value-type="string">
            <text:p>NOMBRE DEL EQUIPO: ADEK</text:p>
          </table:table-cell>
          <table:table-cell table:style-name="ce36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3" office:value-type="string" calcext:value-type="string">
            <text:p>Estampado de polos personalizados <text:span text:style-name="T1">CASO 17</text:span></text:p>
          </table:table-cell>
          <table:table-cell table:style-name="ce36"/>
          <table:table-cell table:number-columns-repeated="1638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CHALMA MENDOZA, Elmer Edison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GUTIERREZ LUCANA, Diana Virginia.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HUAMAN CENTENO, Kely Daysi.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HUIZA QUISPE, Brenda Sofi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ALCA AYME, Yudith Carolina (SCRUM MASTE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4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NOMBRE DE <text:s/>EQUIPO: ÁGIL</text:p>
          </table:table-cell>
          <table:table-cell table:style-name="ce37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3" office:value-type="string" calcext:value-type="string">
            <text:p>Fideos de harina de moringa <text:span text:style-name="T1">CASO 16</text:span></text:p>
          </table:table-cell>
          <table:table-cell table:style-name="ce37"/>
          <table:table-cell table:number-columns-repeated="1638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URAND BENDEZU,July Miriam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GALINDO MIRANDA,Zarcila Alejandrina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GAMBOA RUA , Brenda Tehali </text:p>
          </table:table-cell>
          <table:table-cell table:style-name="ce31"/>
          <table:table-cell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HUAYTALLA VILLANUEVA, Ricardo Kevin</text:p>
          </table:table-cell>
          <table:table-cell table:style-name="ce31"/>
          <table:table-cell table:number-columns-repeated="16381"/>
        </table:table-row>
        <table:table-row table:style-name="ro2" table:number-rows-repeated="2">
          <table:table-cell table:number-columns-repeated="2"/>
          <table:table-cell table:style-name="ce31"/>
          <table:table-cell table:number-columns-repeated="16381"/>
        </table:table-row>
        <table:table-row table:style-name="ro2">
          <table:table-cell table:number-columns-repeated="2"/>
          <table:table-cell table:style-name="ce37"/>
          <table:table-cell table:number-columns-repeated="16381"/>
        </table:table-row>
        <table:table-row table:style-name="ro2">
          <table:table-cell table:style-name="ce7"/>
          <table:table-cell table:style-name="ce10" office:value-type="string" calcext:value-type="string">
            <text:p>NOMBRE DE <text:s/>EQUIPO: <text:s/>LOS MASTER</text:p>
          </table:table-cell>
          <table:table-cell table:style-name="ce38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9" office:value-type="string" calcext:value-type="string">
            <text:p>Servicio de delivery a traves de una aplicación móvil y plataforma interactiva <text:span text:style-name="T1">CASO 15</text:span></text:p>
          </table:table-cell>
          <table:table-cell table:style-name="ce38"/>
          <table:table-cell table:number-columns-repeated="1638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ARESTE, PALOMINO, Deyvis</text:p>
          </table:table-cell>
          <table:table-cell table:style-name="ce39"/>
          <table:table-cell table:number-columns-repeated="1638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BERROCAL ESCALANTE, Newton Paul </text:p>
          </table:table-cell>
          <table:table-cell table:style-name="ce39"/>
          <table:table-cell table:number-columns-repeated="1638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CORAS SULCA, Nilo Amidey </text:p>
          </table:table-cell>
          <table:table-cell table:style-name="ce39"/>
          <table:table-cell table:number-columns-repeated="1638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CURAHUA VARGAS, Gissel Yajhaira (SCRUM MASTER)</text:p>
          </table:table-cell>
          <table:table-cell table:style-name="ce39"/>
          <table:table-cell table:number-columns-repeated="16381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21" office:value-type="string" calcext:value-type="string">
            <text:p>TRUJILLO PALOMINO, Prins Colyns </text:p>
          </table:table-cell>
          <table:table-cell table:style-name="ce38"/>
          <table:table-cell table:number-columns-repeated="16381"/>
        </table:table-row>
        <table:table-row table:style-name="ro2">
          <table:table-cell table:style-name="ce8"/>
          <table:table-cell table:style-name="ce21"/>
          <table:table-cell table:style-name="ce38"/>
          <table:table-cell table:number-columns-repeated="16381"/>
        </table:table-row>
        <table:table-row table:style-name="ro2">
          <table:table-cell table:style-name="ce7"/>
          <table:table-cell/>
          <table:table-cell table:style-name="ce38"/>
          <table:table-cell table:number-columns-repeated="16381"/>
        </table:table-row>
        <table:table-row table:style-name="ro2">
          <table:table-cell table:style-name="ce7"/>
          <table:table-cell table:style-name="ce10" office:value-type="string" calcext:value-type="string">
            <text:p>NOMBRE DE <text:s/>EQUIPO: <text:s/>SINERGIA</text:p>
          </table:table-cell>
          <table:table-cell table:style-name="ce38"/>
          <table:table-cell table:number-columns-repeated="16381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3" office:value-type="string" calcext:value-type="string">
            <text:p>Almuerzos Saludables Naturalmente Good Food <text:span text:style-name="T1">CASO 14</text:span></text:p>
          </table:table-cell>
          <table:table-cell table:style-name="ce38"/>
          <table:table-cell table:number-columns-repeated="1638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CALLOCUNTO REJAS, Eliana Guisel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ISNEROS ENCISO, Julio Enrique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LOPE CONTRERAS, Annie Katherine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LLQUI QUISPE, Marleny Eduard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AMANI LOPEZ, Yorgelis Kassandra (SCRUM MASTER)</text:p>
          </table:table-cell>
          <table:table-cell table:style-name="ce31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 text:c="2"/>MILTON FRIEDMAN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22" office:value-type="string" calcext:value-type="string">
            <text:p>Eco - Vasos <text:span text:style-name="T3">CASO 13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AGUILAR PEREZ, Ketty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3" office:value-type="string" calcext:value-type="string">
            <text:p>CASTILLO SIERRA, Jhoel Ronald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>
            <text:p>CHOQUEHUANCA CISNEROS, Randy Mario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BERMUDO SOTOMAYOR, Fredy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3" office:value-type="string" calcext:value-type="string">
            <text:p>ESPINOZA GALINDO, Kevin Herbart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/>ELINOR OSTROM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8" office:value-type="string" calcext:value-type="string">
            <text:p>Cafeteria - Workplace - "Samariy Cafe"<text:span text:style-name="T2">CASO 12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AÑANCA MITMA, Zahira Melissa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3" office:value-type="string" calcext:value-type="string">
            <text:p>ARIAS RONDINEL, Saul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>
            <text:p>CONGA CARDENAS, Jhony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GOMEZ AYALA, Margoth Rossio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3" office:value-type="string" calcext:value-type="string">
            <text:p>GUTIERREZ ARANCIBIA, Luz Maria</text:p>
          </table:table-cell>
          <table:table-cell table:style-name="ce31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/>PROYECTO REACTIVADOR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24" office:value-type="string" calcext:value-type="string">
            <text:p>produccion y comercializacion de galletas de berros <text:span text:style-name="T2">CASO 11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BEJAR COLOS, Liz Marcia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3" office:value-type="string" calcext:value-type="string">
            <text:p>CHUMBES ALFARO, John Royer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>
            <text:p>FELICES POMA, Alejandro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HUAMAN CISNEROS, Jose Luis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3" office:value-type="string" calcext:value-type="string">
            <text:p>HUASACCA NAVARRO, Irving Felipe</text:p>
          </table:table-cell>
          <table:table-cell table:style-name="ce31"/>
          <table:table-cell/>
          <table:table-cell table:style-name="ce43"/>
          <table:table-cell table:number-columns-repeated="16379"/>
        </table:table-row>
        <table:table-row table:style-name="ro2">
          <table:table-cell table:style-name="ce6"/>
          <table:table-cell table:style-name="ce23"/>
          <table:table-cell table:style-name="ce3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/>VAN-TIR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24" office:value-type="string" calcext:value-type="string">
            <text:p>Proveedor de servicio de internet inalambrico (WISP)<text:span text:style-name="T2">CASO 09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LFARO CALDERON, Juan Carlos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3" office:value-type="string" calcext:value-type="string">
            <text:p>CONTRERAS QUISPE, Bladimir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>
            <text:p>HUARACA YUYALI, Luis Brayan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MELGAR QUINTANA, Reyder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5" office:value-type="string" calcext:value-type="string">
            <text:p>HUALLANCA CONDORI,Walter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2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/>LA MAGIA DE TRABAJAR CON ÉXITO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8" office:value-type="string" calcext:value-type="string">
            <text:p>Manualidades decorativas <text:span text:style-name="T2">CASO 07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CARBAJAL QUISPE, Ross Mery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3" office:value-type="string" calcext:value-type="string">
            <text:p>FERNANDEZ ANDIA, Ly Katery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>
            <text:p>HUAMAN BRAVO, Alina Kimberly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LAGOS URBINA, Ruth Erick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UTIERRES PERALTA, MIGUEL 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/>LOS MAQTAS DE LA ECONOMIA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8" office:value-type="string" calcext:value-type="string">
            <text:p>marketing digital<text:span text:style-name="T2"> CASO 06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ALMONACID ZAMORA, Luis Miguel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3" office:value-type="string" calcext:value-type="string">
            <text:p>BERROCAL GAVILAN, Yerson Breni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>
            <text:p>BORDA TORRES, Noe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ENCISO HUAMAN, RuriYondany</text:p>
          </table:table-cell>
          <table:table-cell table:style-name="ce31"/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QUISPE VARGAS, William Wilmer</text:p>
          </table:table-cell>
          <table:table-cell table:style-name="ce4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3"/>
          <table:table-cell table:style-name="ce31"/>
          <table:table-cell table:number-columns-repeated="16381"/>
        </table:table-row>
        <table:table-row table:style-name="ro2">
          <table:table-cell table:style-name="ce9"/>
          <table:table-cell table:style-name="ce12" office:value-type="string" calcext:value-type="string">
            <text:p>NOMBRE DEL EQUIPO: CAZADORES DE OPORTUNIDADES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18" office:value-type="string" calcext:value-type="string">
            <text:p>Samay Filtrantes <text:span text:style-name="T2">CASO 04</text:span></text:p>
          </table:table-cell>
          <table:table-cell table:style-name="ce41"/>
          <table:table-cell table:number-columns-repeated="1638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RMUDO HEREDIA, Felix Manuel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ASTILLO GUTIERREZ, Vanesa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string" calcext:value-type="string">
            <text:p>MAMANI CONTRERAS, JAKOV LEONARDO (SCRUM MASTER)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string" calcext:value-type="string">
            <text:p>CONDORI ESPINO, Mc Dhany Enrique </text:p>
          </table:table-cell>
          <table:table-cell table:style-name="ce31"/>
          <table:table-cell table:number-columns-repeated="16381"/>
        </table:table-row>
        <table:table-row table:style-name="ro2">
          <table:table-cell table:style-name="ce4"/>
          <table:table-cell table:style-name="ce23"/>
          <table:table-cell table:style-name="ce31"/>
          <table:table-cell table:number-columns-repeated="16381"/>
        </table:table-row>
        <table:table-row table:style-name="ro2">
          <table:table-cell/>
          <table:table-cell table:style-name="ce26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NOMBRE DE <text:s/>EQUIPO: <text:s text:c="2"/>ÁGUILA REAL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27" office:value-type="string" calcext:value-type="string">
            <text:p>Plantas aromaticas y culinarias en macetas <text:span text:style-name="T2">CASO 02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>
            <text:p>CARDENAS PUMALLIHUA, Jeison <text:s/>(SCRUM MASTER)</text:p>
          </table:table-cell>
          <table:table-cell table:number-columns-repeated="1638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8" office:value-type="string" calcext:value-type="string">
            <text:p>CASTILLO LOPEZ, Kattya Yashirth</text:p>
          </table:table-cell>
          <table:table-cell table:number-columns-repeated="1638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8" office:value-type="string" calcext:value-type="string">
            <text:p>HUAMANTOMA PUMALLIHUA, Karol Jesus</text:p>
          </table:table-cell>
          <table:table-cell table:number-columns-repeated="1638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8" office:value-type="string" calcext:value-type="string">
            <text:p>LINARES GUTIERREZ, Rayda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28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NOMBRE DE <text:s/>EQUIPO: <text:s text:c="2"/>PEDRO CASTILLO</text:p>
          </table:table-cell>
          <table:table-cell table:number-columns-repeated="16382"/>
        </table:table-row>
        <table:table-row table:style-name="ro3">
          <table:table-cell table:style-name="ce3" office:value-type="string" calcext:value-type="string">
            <text:p>Nombre del Proyecto</text:p>
          </table:table-cell>
          <table:table-cell table:style-name="ce29" office:value-type="string" calcext:value-type="string">
            <text:p>Tienda virtual de llantas <text:span text:style-name="T1">CASO 01</text:span></text:p>
          </table:table-cell>
          <table:table-cell table:number-columns-repeated="1638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UYA ESCALANTE, Joel Frank</text:p>
          </table:table-cell>
          <table:table-cell table:number-columns-repeated="1638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TACURI BELLIDO, Ivan (SCRUM MASTER)</text:p>
          </table:table-cell>
          <table:table-cell table:number-columns-repeated="1638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LOPEZ HUAMAN, Elvis</text:p>
          </table:table-cell>
          <table:table-cell table:number-columns-repeated="1638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INCO HUAMANI, MARCO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UAMAN PEREZ, Ivan Antoni</text:p>
          </table:table-cell>
          <table:table-cell table:number-columns-repeated="16382"/>
        </table:table-row>
        <table:table-row table:style-name="ro2" table:number-rows-repeated="10484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2" table:style-name="ta2">
        <table:table-column table:style-name="co5" table:number-columns-repeated="16384" table:default-cell-style-name="Default"/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dc:creator>Usuario</dc:creator>
    <meta:print-date>2021-07-13T03:46:53</meta:print-date>
    <meta:creation-date>2021-04-18T17:35:37</meta:creation-date>
    <dc:date>2021-07-13T04:15:36</dc:date>
    <meta:generator>LibreOffice/24.2.4.2$Linux_X86_64 LibreOffice_project/420$Build-2</meta:generator>
    <meta:document-statistic meta:table-count="2" meta:cell-count="204" meta:object-count="0"/>
    <meta:user-defined meta:name="AppVersion">16.0300</meta:user-defined>
  </office:meta>
</office:document-meta>
</file>