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2.23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609cm" fo:break-before="auto" style:use-optimal-row-height="false"/>
    </style:style>
    <style:style style:name="ta1" style:family="table" style:master-page-name="PageStyle_5f_Priorización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">
      <style:table-cell-properties style:rotation-align="none"/>
    </style:style>
    <style:style style:name="ce10" style:family="table-cell" style:parent-style-name="Default" style:data-style-name="N13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iorizació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PRIORIZACION DE PROYECTOS</text:p>
          </table:table-cell>
          <table:covered-table-cell table:number-columns-repeated="4" table:style-name="ce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>
            <text:p>Proyecto</text:p>
          </table:table-cell>
          <table:table-cell table:style-name="ce7" office:value-type="string" calcext:value-type="string">
            <text:p>Inversión</text:p>
          </table:table-cell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number-columns-repeated="16378"/>
        </table:table-row>
        <table:table-row table:style-name="ro3">
          <table:table-cell/>
          <table:table-cell table:style-name="ce3" office:value-type="string" calcext:value-type="string">
            <text:p>A</text:p>
          </table:table-cell>
          <table:table-cell table:style-name="ce8" office:value-type="float" office:value="-3500" calcext:value-type="float">
            <text:p>-3500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3200" calcext:value-type="float">
            <text:p>3200</text:p>
          </table:table-cell>
          <table:table-cell table:style-name="ce8" office:value-type="float" office:value="2500" calcext:value-type="float">
            <text:p>2500</text:p>
          </table:table-cell>
          <table:table-cell table:number-columns-repeated="16378"/>
        </table:table-row>
        <table:table-row table:style-name="ro3">
          <table:table-cell/>
          <table:table-cell table:style-name="ce3" office:value-type="string" calcext:value-type="string">
            <text:p>B</text:p>
          </table:table-cell>
          <table:table-cell table:style-name="ce8" office:value-type="float" office:value="-3500" calcext:value-type="float">
            <text:p>-35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3200" calcext:value-type="float">
            <text:p>3200</text:p>
          </table:table-cell>
          <table:table-cell table:number-columns-repeated="16378"/>
        </table:table-row>
        <table:table-row table:style-name="ro3">
          <table:table-cell/>
          <table:table-cell table:style-name="ce3" office:value-type="string" calcext:value-type="string">
            <text:p>C</text:p>
          </table:table-cell>
          <table:table-cell table:style-name="ce8" office:value-type="float" office:value="-2000" calcext:value-type="float">
            <text:p>-2000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700" calcext:value-type="float">
            <text:p>7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a.)</text:p>
          </table:table-cell>
          <table:table-cell table:style-name="ce4" office:value-type="string" calcext:value-type="string" table:number-columns-spanned="5" table:number-rows-spanned="1">
            <text:p>Primero calculamos el VAN <text:s/>de cada proyecto</text:p>
          </table:table-cell>
          <table:covered-table-cell table:number-columns-repeated="4" table:style-name="ce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k =</text:p>
          </table:table-cell>
          <table:table-cell table:style-name="ce9" office:value-type="percentage" office:value="0.2" calcext:value-type="percentage">
            <text:p>20 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AN (A) =</text:p>
          </table:table-cell>
          <table:table-cell table:style-name="ce10" table:formula="of:=NPV([.C11];[.D5:.F5])+[.C5]" office:value-type="float" office:value="1835.64814814815" calcext:value-type="float">
            <text:p>$1,835.6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AN (B) =</text:p>
          </table:table-cell>
          <table:table-cell table:style-name="ce10" table:formula="of:=NPV([.C11];[.D6:.F6])+[.C6]" office:value-type="float" office:value="574.074074074074" calcext:value-type="float">
            <text:p>$574.0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AN (c) =</text:p>
          </table:table-cell>
          <table:table-cell table:style-name="ce10" table:formula="of:=NPV([.C11];[.D7:.F7])+[.C7]" office:value-type="float" office:value="446.75925925926" calcext:value-type="float">
            <text:p>$446.7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i no tuvieramos restricción de presupuesto debemos escoger los proyectos qu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tengan VAN positivos. Por lo tanto se deben selñeccionar los tres proyectos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.)</text:p>
          </table:table-cell>
          <table:table-cell office:value-type="string" calcext:value-type="string">
            <text:p>Obtener el Indice de Rentabilidad cuando existe racionamiento de capital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Proyecto A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VN</text:p>
          </table:table-cell>
          <table:table-cell table:style-name="ce10" table:formula="of:=NPV([.C11];[.D5:.F5])" office:value-type="float" office:value="5335.64814814815" calcext:value-type="float">
            <text:p>$5,335.6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nversión</text:p>
          </table:table-cell>
          <table:table-cell office:value-type="float" office:value="3500" calcext:value-type="float">
            <text:p>35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R (A) =</text:p>
          </table:table-cell>
          <table:table-cell table:style-name="ce10" table:formula="of:=[.C25]/[.C26]" office:value-type="float" office:value="1.5244708994709" calcext:value-type="float">
            <text:p>$1.5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Proyecto B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VN</text:p>
          </table:table-cell>
          <table:table-cell table:style-name="ce10" table:formula="of:=NPV([.C11];[.D6:.F6])" office:value-type="float" office:value="4074.07407407407" calcext:value-type="float">
            <text:p>$4,074.07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nversión</text:p>
          </table:table-cell>
          <table:table-cell table:formula="of:=-[.C6]" office:value-type="float" office:value="3500" calcext:value-type="float">
            <text:p>35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R (B)</text:p>
          </table:table-cell>
          <table:table-cell table:style-name="ce10" table:formula="of:=[.C30]/[.C31]" office:value-type="float" office:value="1.16402116402116" calcext:value-type="float">
            <text:p>$1.1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Proyecto C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VN =</text:p>
          </table:table-cell>
          <table:table-cell table:style-name="ce10" table:formula="of:=NPV([.C11];[.D7:.F7])" office:value-type="float" office:value="2446.75925925926" calcext:value-type="float">
            <text:p>$2,446.76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nversión =</text:p>
          </table:table-cell>
          <table:table-cell table:formula="of:=-[.C7]" office:value-type="float" office:value="2000" calcext:value-type="float">
            <text:p>2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R © =</text:p>
          </table:table-cell>
          <table:table-cell table:style-name="ce10" table:formula="of:=[.C35]/[.C36]" office:value-type="float" office:value="1.22337962962963" calcext:value-type="float">
            <text:p>$1.2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Presupuesto de 6,000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i ordenamos los proyectos por el IR, se tien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1er <text:s/>Pyto A =</text:p>
          </table:table-cell>
          <table:table-cell office:value-type="float" office:value="1.52" calcext:value-type="float">
            <text:p>1.5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2do Pyto C =</text:p>
          </table:table-cell>
          <table:table-cell office:value-type="float" office:value="1.22" calcext:value-type="float">
            <text:p>1.2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3ro Pyto B =</text:p>
          </table:table-cell>
          <table:table-cell office:value-type="float" office:value="1.16" calcext:value-type="float">
            <text:p>1.1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a inversión de los proyectos A y C suman 5,500 &lt; 60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ntonces se elegiría los proyectos A y C porque tienen los IR más altos y la inversió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total no excede el límite de S/. 6,000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Además se refuerza con VAN (a) + VAN© = </text:p>
          </table:table-cell>
          <table:table-cell table:number-columns-repeated="3"/>
          <table:table-cell table:style-name="ce10" table:formula="of:=[.C13]+[.C17]" office:value-type="float" office:value="2282.40740740741" calcext:value-type="float">
            <text:p>$2,282.41</text:p>
          </table:table-cell>
          <table:table-cell office:value-type="string" calcext:value-type="string">
            <text:p>que es superior a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AN (b) + Van © =</text:p>
          </table:table-cell>
          <table:table-cell/>
          <table:table-cell table:style-name="ce10" table:formula="of:=[.C15]+[.C17]" office:value-type="float" office:value="1020.83333333333" calcext:value-type="float">
            <text:p>$1,020.83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$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33P0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iorización" style:display-name="PageStyle_Priorizació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Corporation</meta:initial-creator>
    <dc:creator>EDISON ACHALMA</dc:creator>
    <meta:creation-date>1996-11-27T10:00:04</meta:creation-date>
    <dc:date>2021-08-04T00:27:23</dc:date>
    <meta:generator>LibreOffice/24.2.4.2$Linux_X86_64 LibreOffice_project/420$Build-2</meta:generator>
    <meta:document-statistic meta:table-count="1" meta:cell-count="72" meta:object-count="0"/>
    <meta:user-defined meta:name="AppVersion">16.0300</meta:user-defined>
  </office:meta>
</office:document-meta>
</file>