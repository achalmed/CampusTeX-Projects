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10000006900000015AE0B812F.png" manifest:media-type="image/png"/>
  <manifest:file-entry manifest:full-path="Pictures/10000B9800000AD50000023187A6850A.emf" manifest:media-type="image/x-emf"/>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Narrow" svg:font-family="'Arial Narrow'" style:font-family-generic="swiss"/>
    <style:font-face style:name="Arial1" svg:font-family="Arial"/>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37cm"/>
    </style:style>
    <style:style style:name="co2" style:family="table-column">
      <style:table-column-properties fo:break-before="auto" style:column-width="3.244cm"/>
    </style:style>
    <style:style style:name="co3" style:family="table-column">
      <style:table-column-properties fo:break-before="auto" style:column-width="4.81cm"/>
    </style:style>
    <style:style style:name="co4" style:family="table-column">
      <style:table-column-properties fo:break-before="auto" style:column-width="3.189cm"/>
    </style:style>
    <style:style style:name="co5" style:family="table-column">
      <style:table-column-properties fo:break-before="auto" style:column-width="2.713cm"/>
    </style:style>
    <style:style style:name="co6" style:family="table-column">
      <style:table-column-properties fo:break-before="auto" style:column-width="1.203cm"/>
    </style:style>
    <style:style style:name="co7" style:family="table-column">
      <style:table-column-properties fo:break-before="auto" style:column-width="2.432cm"/>
    </style:style>
    <style:style style:name="co8" style:family="table-column">
      <style:table-column-properties fo:break-before="auto" style:column-width="2.182cm"/>
    </style:style>
    <style:style style:name="co9" style:family="table-column">
      <style:table-column-properties fo:break-before="auto" style:column-width="2.321cm"/>
    </style:style>
    <style:style style:name="co10" style:family="table-column">
      <style:table-column-properties fo:break-before="auto" style:column-width="2.685cm"/>
    </style:style>
    <style:style style:name="co11" style:family="table-column">
      <style:table-column-properties fo:break-before="auto" style:column-width="2.489cm"/>
    </style:style>
    <style:style style:name="co12" style:family="table-column">
      <style:table-column-properties fo:break-before="auto" style:column-width="1.371cm"/>
    </style:style>
    <style:style style:name="co13" style:family="table-column">
      <style:table-column-properties fo:break-before="auto" style:column-width="2.602cm"/>
    </style:style>
    <style:style style:name="co14" style:family="table-column">
      <style:table-column-properties fo:break-before="auto" style:column-width="2.937cm"/>
    </style:style>
    <style:style style:name="co15" style:family="table-column">
      <style:table-column-properties fo:break-before="auto" style:column-width="3.692cm"/>
    </style:style>
    <style:style style:name="co16" style:family="table-column">
      <style:table-column-properties fo:break-before="auto" style:column-width="3.3cm"/>
    </style:style>
    <style:style style:name="co17" style:family="table-column">
      <style:table-column-properties fo:break-before="auto" style:column-width="3.607cm"/>
    </style:style>
    <style:style style:name="co18" style:family="table-column">
      <style:table-column-properties fo:break-before="auto" style:column-width="2.041cm"/>
    </style:style>
    <style:style style:name="co19" style:family="table-column">
      <style:table-column-properties fo:break-before="auto" style:column-width="2.461cm"/>
    </style:style>
    <style:style style:name="co20" style:family="table-column">
      <style:table-column-properties fo:break-before="auto" style:column-width="2.265cm"/>
    </style:style>
    <style:style style:name="co21" style:family="table-column">
      <style:table-column-properties fo:break-before="auto" style:column-width="3.552cm"/>
    </style:style>
    <style:style style:name="co22" style:family="table-column">
      <style:table-column-properties fo:break-before="auto" style:column-width="4.978cm"/>
    </style:style>
    <style:style style:name="co23" style:family="table-column">
      <style:table-column-properties fo:break-before="auto" style:column-width="1.035cm"/>
    </style:style>
    <style:style style:name="co24" style:family="table-column">
      <style:table-column-properties fo:break-before="auto" style:column-width="0.811cm"/>
    </style:style>
    <style:style style:name="co25" style:family="table-column">
      <style:table-column-properties fo:break-before="auto" style:column-width="1.007cm"/>
    </style:style>
    <style:style style:name="co26" style:family="table-column">
      <style:table-column-properties fo:break-before="auto" style:column-width="1.314cm"/>
    </style:style>
    <style:style style:name="co27" style:family="table-column">
      <style:table-column-properties fo:break-before="auto" style:column-width="1.873cm"/>
    </style:style>
    <style:style style:name="co28" style:family="table-column">
      <style:table-column-properties fo:break-before="auto" style:column-width="1.734cm"/>
    </style:style>
    <style:style style:name="co29" style:family="table-column">
      <style:table-column-properties fo:break-before="auto" style:column-width="1.649cm"/>
    </style:style>
    <style:style style:name="co30" style:family="table-column">
      <style:table-column-properties fo:break-before="auto" style:column-width="1.901cm"/>
    </style:style>
    <style:style style:name="co31" style:family="table-column">
      <style:table-column-properties fo:break-before="auto" style:column-width="1.706cm"/>
    </style:style>
    <style:style style:name="co32" style:family="table-column">
      <style:table-column-properties fo:break-before="auto" style:column-width="1.79cm"/>
    </style:style>
    <style:style style:name="co33" style:family="table-column">
      <style:table-column-properties fo:break-before="auto" style:column-width="4.614cm"/>
    </style:style>
    <style:style style:name="co34" style:family="table-column">
      <style:table-column-properties fo:break-before="auto" style:column-width="3.328cm"/>
    </style:style>
    <style:style style:name="co35" style:family="table-column">
      <style:table-column-properties fo:break-before="auto" style:column-width="4.336cm"/>
    </style:style>
    <style:style style:name="co36" style:family="table-column">
      <style:table-column-properties fo:break-before="auto" style:column-width="2.21cm"/>
    </style:style>
    <style:style style:name="co37" style:family="table-column">
      <style:table-column-properties fo:break-before="auto" style:column-width="2.293cm"/>
    </style:style>
    <style:style style:name="co38" style:family="table-column">
      <style:table-column-properties fo:break-before="auto" style:column-width="1.09cm"/>
    </style:style>
    <style:style style:name="co39" style:family="table-column">
      <style:table-column-properties fo:break-before="auto" style:column-width="2.628cm"/>
    </style:style>
    <style:style style:name="co40" style:family="table-column">
      <style:table-column-properties fo:break-before="auto" style:column-width="3.161cm"/>
    </style:style>
    <style:style style:name="co41" style:family="table-column">
      <style:table-column-properties fo:break-before="auto" style:column-width="3.972cm"/>
    </style:style>
    <style:style style:name="co42" style:family="table-column">
      <style:table-column-properties fo:break-before="auto" style:column-width="2.852cm"/>
    </style:style>
    <style:style style:name="co43" style:family="table-column">
      <style:table-column-properties fo:break-before="page" style:column-width="3.72cm"/>
    </style:style>
    <style:style style:name="co44" style:family="table-column">
      <style:table-column-properties fo:break-before="auto" style:column-width="3.104cm"/>
    </style:style>
    <style:style style:name="co45" style:family="table-column">
      <style:table-column-properties fo:break-before="auto" style:column-width="1.231cm"/>
    </style:style>
    <style:style style:name="co46" style:family="table-column">
      <style:table-column-properties fo:break-before="auto" style:column-width="3.524cm"/>
    </style:style>
    <style:style style:name="co47" style:family="table-column">
      <style:table-column-properties fo:break-before="auto" style:column-width="7.608cm"/>
    </style:style>
    <style:style style:name="co48" style:family="table-column">
      <style:table-column-properties fo:break-before="auto" style:column-width="1.595cm"/>
    </style:style>
    <style:style style:name="co49" style:family="table-column">
      <style:table-column-properties fo:break-before="auto" style:column-width="1.845cm"/>
    </style:style>
    <style:style style:name="co50" style:family="table-column">
      <style:table-column-properties fo:break-before="auto" style:column-width="2.545cm"/>
    </style:style>
    <style:style style:name="co51" style:family="table-column">
      <style:table-column-properties fo:break-before="auto" style:column-width="2.378cm"/>
    </style:style>
    <style:style style:name="co52" style:family="table-column">
      <style:table-column-properties fo:break-before="auto" style:column-width="3.411cm"/>
    </style:style>
    <style:style style:name="co53" style:family="table-column">
      <style:table-column-properties fo:break-before="auto" style:column-width="7.44cm"/>
    </style:style>
    <style:style style:name="co54" style:family="table-column">
      <style:table-column-properties fo:break-before="auto" style:column-width="1.51cm"/>
    </style:style>
    <style:style style:name="co55" style:family="table-column">
      <style:table-column-properties fo:break-before="auto" style:column-width="2.656cm"/>
    </style:style>
    <style:style style:name="co56" style:family="table-column">
      <style:table-column-properties fo:break-before="auto" style:column-width="4.699cm"/>
    </style:style>
    <style:style style:name="co57" style:family="table-column">
      <style:table-column-properties fo:break-before="auto" style:column-width="3.999cm"/>
    </style:style>
    <style:style style:name="co58" style:family="table-column">
      <style:table-column-properties fo:break-before="auto" style:column-width="1.958cm"/>
    </style:style>
    <style:style style:name="co59" style:family="table-column">
      <style:table-column-properties fo:break-before="auto" style:column-width="7.105cm"/>
    </style:style>
    <style:style style:name="co60" style:family="table-column">
      <style:table-column-properties fo:break-before="auto" style:column-width="2.125cm"/>
    </style:style>
    <style:style style:name="co61" style:family="table-column">
      <style:table-column-properties fo:break-before="auto" style:column-width="6.824cm"/>
    </style:style>
    <style:style style:name="co62" style:family="table-column">
      <style:table-column-properties fo:break-before="auto" style:column-width="1.762cm"/>
    </style:style>
    <style:style style:name="co63" style:family="table-column">
      <style:table-column-properties fo:break-before="auto" style:column-width="2.154cm"/>
    </style:style>
    <style:style style:name="co64" style:family="table-column">
      <style:table-column-properties fo:break-before="auto" style:column-width="11.217cm"/>
    </style:style>
    <style:style style:name="co65" style:family="table-column">
      <style:table-column-properties fo:break-before="auto" style:column-width="2.517cm"/>
    </style:style>
    <style:style style:name="co66" style:family="table-column">
      <style:table-column-properties fo:break-before="auto" style:column-width="3.496cm"/>
    </style:style>
    <style:style style:name="co67" style:family="table-column">
      <style:table-column-properties fo:break-before="auto" style:column-width="7.412cm"/>
    </style:style>
    <style:style style:name="co68" style:family="table-column">
      <style:table-column-properties fo:break-before="auto" style:column-width="2.769cm"/>
    </style:style>
    <style:style style:name="co69" style:family="table-column">
      <style:table-column-properties fo:break-before="auto" style:column-width="0.531cm"/>
    </style:style>
    <style:style style:name="co70" style:family="table-column">
      <style:table-column-properties fo:break-before="auto" style:column-width="9.537cm"/>
    </style:style>
    <style:style style:name="co71" style:family="table-column">
      <style:table-column-properties fo:break-before="auto" style:column-width="1.175cm"/>
    </style:style>
    <style:style style:name="co72" style:family="table-column">
      <style:table-column-properties fo:break-before="auto" style:column-width="1.566cm"/>
    </style:style>
    <style:style style:name="co73" style:family="table-column">
      <style:table-column-properties fo:break-before="auto" style:column-width="1.93cm"/>
    </style:style>
    <style:style style:name="co74" style:family="table-column">
      <style:table-column-properties fo:break-before="auto" style:column-width="2.014cm"/>
    </style:style>
    <style:style style:name="co75" style:family="table-column">
      <style:table-column-properties fo:break-before="auto" style:column-width="3.048cm"/>
    </style:style>
    <style:style style:name="co76" style:family="table-column">
      <style:table-column-properties fo:break-before="auto" style:column-width="6.376cm"/>
    </style:style>
    <style:style style:name="co77" style:family="table-column">
      <style:table-column-properties fo:break-before="auto" style:column-width="6.152cm"/>
    </style:style>
    <style:style style:name="co78" style:family="table-column">
      <style:table-column-properties fo:break-before="auto" style:column-width="2.069cm"/>
    </style:style>
    <style:style style:name="co79" style:family="table-column">
      <style:table-column-properties fo:break-before="auto" style:column-width="1.258cm"/>
    </style:style>
    <style:style style:name="co80" style:family="table-column">
      <style:table-column-properties fo:break-before="auto" style:column-width="1.427cm"/>
    </style:style>
    <style:style style:name="co81" style:family="table-column">
      <style:table-column-properties fo:break-before="auto" style:column-width="1.677cm"/>
    </style:style>
    <style:style style:name="co82" style:family="table-column">
      <style:table-column-properties fo:break-before="auto" style:column-width="1.482cm"/>
    </style:style>
    <style:style style:name="co83" style:family="table-column">
      <style:table-column-properties fo:break-before="auto" style:column-width="1.623cm"/>
    </style:style>
    <style:style style:name="co84" style:family="table-column">
      <style:table-column-properties fo:break-before="auto" style:column-width="7.244cm"/>
    </style:style>
    <style:style style:name="co85" style:family="table-column">
      <style:table-column-properties fo:break-before="auto" style:column-width="3.02cm"/>
    </style:style>
    <style:style style:name="co86" style:family="table-column">
      <style:table-column-properties fo:break-before="auto" style:column-width="2.824cm"/>
    </style:style>
    <style:style style:name="co87" style:family="table-column">
      <style:table-column-properties fo:break-before="auto" style:column-width="3.803cm"/>
    </style:style>
    <style:style style:name="co88" style:family="table-column">
      <style:table-column-properties fo:break-before="auto" style:column-width="7.551cm"/>
    </style:style>
    <style:style style:name="co89" style:family="table-column">
      <style:table-column-properties fo:break-before="auto" style:column-width="2.798cm"/>
    </style:style>
    <style:style style:name="co90" style:family="table-column">
      <style:table-column-properties fo:break-before="auto" style:column-width="2.406cm"/>
    </style:style>
    <style:style style:name="co91" style:family="table-column">
      <style:table-column-properties fo:break-before="auto" style:column-width="2.741cm"/>
    </style:style>
    <style:style style:name="co92" style:family="table-column">
      <style:table-column-properties fo:break-before="auto" style:column-width="6.041cm"/>
    </style:style>
    <style:style style:name="co93" style:family="table-column">
      <style:table-column-properties fo:break-before="auto" style:column-width="8.671cm"/>
    </style:style>
    <style:style style:name="co94" style:family="table-column">
      <style:table-column-properties fo:break-before="auto" style:column-width="0.979cm"/>
    </style:style>
    <style:style style:name="co95" style:family="table-column">
      <style:table-column-properties fo:break-before="auto" style:column-width="2.574cm"/>
    </style:style>
    <style:style style:name="co96" style:family="table-column">
      <style:table-column-properties fo:break-before="auto" style:column-width="2.09cm"/>
    </style:style>
    <style:style style:name="co97" style:family="table-column">
      <style:table-column-properties fo:break-before="auto" style:column-width="8.447cm"/>
    </style:style>
    <style:style style:name="co98" style:family="table-column">
      <style:table-column-properties fo:break-before="auto" style:column-width="5.985cm"/>
    </style:style>
    <style:style style:name="co99" style:family="table-column">
      <style:table-column-properties fo:break-before="auto" style:column-width="0.783cm"/>
    </style:style>
    <style:style style:name="co100" style:family="table-column">
      <style:table-column-properties fo:break-before="page" style:column-width="2.154cm"/>
    </style:style>
    <style:style style:name="co101" style:family="table-column">
      <style:table-column-properties fo:break-before="auto" style:column-width="7.301cm"/>
    </style:style>
    <style:style style:name="co102" style:family="table-column">
      <style:table-column-properties fo:break-before="auto" style:column-width="3.133cm"/>
    </style:style>
    <style:style style:name="co103" style:family="table-column">
      <style:table-column-properties fo:break-before="auto" style:column-width="6.405cm"/>
    </style:style>
    <style:style style:name="co104" style:family="table-column">
      <style:table-column-properties fo:break-before="auto" style:column-width="6.126cm"/>
    </style:style>
    <style:style style:name="co105" style:family="table-column">
      <style:table-column-properties fo:break-before="auto" style:column-width="2.993cm"/>
    </style:style>
    <style:style style:name="co106" style:family="table-column">
      <style:table-column-properties fo:break-before="auto" style:column-width="4.195cm"/>
    </style:style>
    <style:style style:name="co107" style:family="table-column">
      <style:table-column-properties fo:break-before="auto" style:column-width="2.965cm"/>
    </style:style>
    <style:style style:name="co108" style:family="table-column">
      <style:table-column-properties fo:break-before="auto" style:column-width="6.322cm"/>
    </style:style>
    <style:style style:name="co109" style:family="table-column">
      <style:table-column-properties fo:break-before="auto" style:column-width="2.88cm"/>
    </style:style>
    <style:style style:name="co110" style:family="table-column">
      <style:table-column-properties fo:break-before="auto" style:column-width="6.518cm"/>
    </style:style>
    <style:style style:name="ro1" style:family="table-row">
      <style:table-row-properties style:row-height="0.45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847cm" fo:break-before="auto" style:use-optimal-row-height="false"/>
    </style:style>
    <style:style style:name="ro4" style:family="table-row">
      <style:table-row-properties style:row-height="0.873cm" fo:break-before="auto" style:use-optimal-row-height="false"/>
    </style:style>
    <style:style style:name="ro5" style:family="table-row">
      <style:table-row-properties style:row-height="0.794cm" fo:break-before="auto" style:use-optimal-row-height="false"/>
    </style:style>
    <style:style style:name="ro6" style:family="table-row">
      <style:table-row-properties style:row-height="1.111cm" fo:break-before="auto" style:use-optimal-row-height="false"/>
    </style:style>
    <style:style style:name="ro7" style:family="table-row">
      <style:table-row-properties style:row-height="0.741cm" fo:break-before="auto" style:use-optimal-row-height="false"/>
    </style:style>
    <style:style style:name="ro8" style:family="table-row">
      <style:table-row-properties style:row-height="0.979cm" fo:break-before="auto" style:use-optimal-row-height="false"/>
    </style:style>
    <style:style style:name="ro9" style:family="table-row">
      <style:table-row-properties style:row-height="1.032cm" fo:break-before="auto" style:use-optimal-row-height="false"/>
    </style:style>
    <style:style style:name="ro10" style:family="table-row">
      <style:table-row-properties style:row-height="0.499cm" fo:break-before="auto" style:use-optimal-row-height="true"/>
    </style:style>
    <style:style style:name="ro11" style:family="table-row">
      <style:table-row-properties style:row-height="1cm" fo:break-before="auto" style:use-optimal-row-height="true"/>
    </style:style>
    <style:style style:name="ro12" style:family="table-row">
      <style:table-row-properties style:row-height="2.223cm" fo:break-before="auto" style:use-optimal-row-height="false"/>
    </style:style>
    <style:style style:name="ro13" style:family="table-row">
      <style:table-row-properties style:row-height="0.841cm" fo:break-before="auto" style:use-optimal-row-height="true"/>
    </style:style>
    <style:style style:name="ro14" style:family="table-row">
      <style:table-row-properties style:row-height="0.45cm" fo:break-before="auto" style:use-optimal-row-height="false"/>
    </style:style>
    <style:style style:name="ro15" style:family="table-row">
      <style:table-row-properties style:row-height="0.529cm" fo:break-before="auto" style:use-optimal-row-height="true"/>
    </style:style>
    <style:style style:name="ro16" style:family="table-row">
      <style:table-row-properties style:row-height="1.138cm" fo:break-before="auto" style:use-optimal-row-height="false"/>
    </style:style>
    <style:style style:name="ro17" style:family="table-row">
      <style:table-row-properties style:row-height="0.529cm" fo:break-before="auto" style:use-optimal-row-height="false"/>
    </style:style>
    <style:style style:name="ro18" style:family="table-row">
      <style:table-row-properties style:row-height="1.526cm" fo:break-before="auto" style:use-optimal-row-height="true"/>
    </style:style>
    <style:style style:name="ro19" style:family="table-row">
      <style:table-row-properties style:row-height="2.17cm" fo:break-before="auto" style:use-optimal-row-height="false"/>
    </style:style>
    <style:style style:name="ro20" style:family="table-row">
      <style:table-row-properties style:row-height="1.316cm" fo:break-before="auto" style:use-optimal-row-height="true"/>
    </style:style>
    <style:style style:name="ro21" style:family="table-row">
      <style:table-row-properties style:row-height="0.612cm" fo:break-before="auto" style:use-optimal-row-height="true"/>
    </style:style>
    <style:style style:name="ro22" style:family="table-row">
      <style:table-row-properties style:row-height="0.503cm" fo:break-before="auto" style:use-optimal-row-height="false"/>
    </style:style>
    <style:style style:name="ro23" style:family="table-row">
      <style:table-row-properties style:row-height="1.395cm" fo:break-before="auto" style:use-optimal-row-height="true"/>
    </style:style>
    <style:style style:name="ro24" style:family="table-row">
      <style:table-row-properties style:row-height="1.157cm" fo:break-before="auto" style:use-optimal-row-height="true"/>
    </style:style>
    <style:style style:name="ro25" style:family="table-row">
      <style:table-row-properties style:row-height="0.503cm" fo:break-before="auto" style:use-optimal-row-height="true"/>
    </style:style>
    <style:style style:name="ro26" style:family="table-row">
      <style:table-row-properties style:row-height="0.423cm" fo:break-before="auto" style:use-optimal-row-height="true"/>
    </style:style>
    <style:style style:name="ro27" style:family="table-row">
      <style:table-row-properties style:row-height="1.005cm" fo:break-before="auto" style:use-optimal-row-height="false"/>
    </style:style>
    <style:style style:name="ro28" style:family="table-row">
      <style:table-row-properties style:row-height="0.947cm" fo:break-before="auto" style:use-optimal-row-height="true"/>
    </style:style>
    <style:style style:name="ro29" style:family="table-row">
      <style:table-row-properties style:row-height="1.217cm" fo:break-before="auto" style:use-optimal-row-height="false"/>
    </style:style>
    <style:style style:name="ro30" style:family="table-row">
      <style:table-row-properties style:row-height="1.905cm" fo:break-before="auto" style:use-optimal-row-height="false"/>
    </style:style>
    <style:style style:name="ro31" style:family="table-row">
      <style:table-row-properties style:row-height="0.788cm" fo:break-before="auto" style:use-optimal-row-height="true"/>
    </style:style>
    <style:style style:name="ro32" style:family="table-row">
      <style:table-row-properties style:row-height="2.249cm" fo:break-before="auto" style:use-optimal-row-height="false"/>
    </style:style>
    <style:style style:name="ro33" style:family="table-row">
      <style:table-row-properties style:row-height="0.423cm" fo:break-before="auto" style:use-optimal-row-height="false"/>
    </style:style>
    <style:style style:name="ro34" style:family="table-row">
      <style:table-row-properties style:row-height="1.826cm" fo:break-before="auto" style:use-optimal-row-height="false"/>
    </style:style>
    <style:style style:name="ro35" style:family="table-row">
      <style:table-row-properties style:row-height="0.476cm" fo:break-before="auto" style:use-optimal-row-height="false"/>
    </style:style>
    <style:style style:name="ro36" style:family="table-row">
      <style:table-row-properties style:row-height="1.236cm" fo:break-before="auto" style:use-optimal-row-height="true"/>
    </style:style>
    <style:style style:name="ro37" style:family="table-row">
      <style:table-row-properties style:row-height="1.429cm" fo:break-before="auto" style:use-optimal-row-height="false"/>
    </style:style>
    <style:style style:name="ro38" style:family="table-row">
      <style:table-row-properties style:row-height="0.053cm" fo:break-before="auto" style:use-optimal-row-height="false"/>
    </style:style>
    <style:style style:name="ro39" style:family="table-row">
      <style:table-row-properties style:row-height="0.265cm" fo:break-before="auto" style:use-optimal-row-height="false"/>
    </style:style>
    <style:style style:name="ro40" style:family="table-row">
      <style:table-row-properties style:row-height="0.661cm" fo:break-before="auto" style:use-optimal-row-height="false"/>
    </style:style>
    <style:style style:name="ro41" style:family="table-row">
      <style:table-row-properties style:row-height="0.9cm" fo:break-before="auto" style:use-optimal-row-height="false"/>
    </style:style>
    <style:style style:name="ro42" style:family="table-row">
      <style:table-row-properties style:row-height="0.446cm" fo:break-before="auto" style:use-optimal-row-height="true"/>
    </style:style>
    <style:style style:name="ro43" style:family="table-row">
      <style:table-row-properties style:row-height="1.296cm" fo:break-before="auto" style:use-optimal-row-height="false"/>
    </style:style>
    <style:style style:name="ro44" style:family="table-row">
      <style:table-row-properties style:row-height="0.635cm" fo:break-before="auto" style:use-optimal-row-height="false"/>
    </style:style>
    <style:style style:name="ro45" style:family="table-row">
      <style:table-row-properties style:row-height="0.609cm" fo:break-before="auto" style:use-optimal-row-height="false"/>
    </style:style>
    <style:style style:name="ro46" style:family="table-row">
      <style:table-row-properties style:row-height="0.582cm" fo:break-before="auto" style:use-optimal-row-height="false"/>
    </style:style>
    <style:style style:name="ro47" style:family="table-row">
      <style:table-row-properties style:row-height="0.556cm" fo:break-before="auto" style:use-optimal-row-height="false"/>
    </style:style>
    <style:style style:name="ro48" style:family="table-row">
      <style:table-row-properties style:row-height="1.632cm" fo:break-before="auto" style:use-optimal-row-height="true"/>
    </style:style>
    <style:style style:name="ta1" style:family="table" style:master-page-name="PageStyle_5f_POBLACION">
      <style:table-properties table:display="true" style:writing-mode="lr-tb" table:tab-color="#604a7b"/>
    </style:style>
    <style:style style:name="ta2" style:family="table" style:master-page-name="PageStyle_5f_DEMANDA">
      <style:table-properties table:display="true" style:writing-mode="lr-tb" table:tab-color="#604a7b"/>
    </style:style>
    <style:style style:name="ta3" style:family="table" style:master-page-name="PageStyle_5f_OFERTA">
      <style:table-properties table:display="true" style:writing-mode="lr-tb" table:tab-color="#604a7b"/>
    </style:style>
    <style:style style:name="ta4" style:family="table" style:master-page-name="PageStyle_5f_BRECHA">
      <style:table-properties table:display="true" style:writing-mode="lr-tb" table:tab-color="#604a7b"/>
    </style:style>
    <style:style style:name="ta5" style:family="table" style:master-page-name="PageStyle_5f_PLAN_20_DE_20_PRODUCCION">
      <style:table-properties table:display="true" style:writing-mode="lr-tb" table:tab-color="#604a7b"/>
    </style:style>
    <style:style style:name="ta6" style:family="table" style:master-page-name="PageStyle_5f_TERREN_20_Y_20_OBR_20_CIV">
      <style:table-properties table:display="true" style:writing-mode="lr-tb" table:tab-color="#604a7b"/>
    </style:style>
    <style:style style:name="ta7" style:family="table" style:master-page-name="PageStyle_5f_MUEB_2c__20_MAQ_2c_EQUIP">
      <style:table-properties table:display="true" style:writing-mode="lr-tb" table:tab-color="#604a7b"/>
    </style:style>
    <style:style style:name="ta8" style:family="table" style:master-page-name="PageStyle_5f_INVERS_20_FIJ_20_INTANG">
      <style:table-properties table:display="true" style:writing-mode="lr-tb" table:tab-color="#604a7b"/>
    </style:style>
    <style:style style:name="ta9" style:family="table" style:master-page-name="PageStyle_5f_REMUNERACION">
      <style:table-properties table:display="true" style:writing-mode="lr-tb" table:tab-color="#604a7b"/>
    </style:style>
    <style:style style:name="ta10" style:family="table" style:master-page-name="PageStyle_5f_CAP_20_TRABAJ">
      <style:table-properties table:display="true" style:writing-mode="lr-tb" table:tab-color="#604a7b"/>
    </style:style>
    <style:style style:name="ta11" style:family="table" style:master-page-name="PageStyle_5f_INVERSION">
      <style:table-properties table:display="true" style:writing-mode="lr-tb" table:tab-color="#604a7b"/>
    </style:style>
    <style:style style:name="ta12" style:family="table" style:master-page-name="PageStyle_5f_RESUM_20_INVER">
      <style:table-properties table:display="true" style:writing-mode="lr-tb" table:tab-color="#604a7b"/>
    </style:style>
    <style:style style:name="ta13" style:family="table" style:master-page-name="PageStyle_5f_CRONOG">
      <style:table-properties table:display="true" style:writing-mode="lr-tb" table:tab-color="#604a7b"/>
    </style:style>
    <style:style style:name="ta14" style:family="table" style:master-page-name="PageStyle_5f_FINANCIAMIENT">
      <style:table-properties table:display="true" style:writing-mode="lr-tb" table:tab-color="#604a7b"/>
    </style:style>
    <style:style style:name="ta15" style:family="table" style:master-page-name="PageStyle_5f_COSTO_20_PROD_20_Y_20_OPER">
      <style:table-properties table:display="true" style:writing-mode="lr-tb" table:tab-color="#604a7b"/>
    </style:style>
    <style:style style:name="ta16" style:family="table" style:master-page-name="PageStyle_5f_DEPRECIAC_20_">
      <style:table-properties table:display="true" style:writing-mode="lr-tb" table:tab-color="#604a7b"/>
    </style:style>
    <style:style style:name="ta17" style:family="table" style:master-page-name="PageStyle_5f_COSTOS_20_TOTALES">
      <style:table-properties table:display="true" style:writing-mode="lr-tb" table:tab-color="#604a7b"/>
    </style:style>
    <style:style style:name="ta18" style:family="table" style:master-page-name="PageStyle_5f_INGRESOS">
      <style:table-properties table:display="true" style:writing-mode="lr-tb" table:tab-color="#604a7b"/>
    </style:style>
    <style:style style:name="ta19" style:family="table" style:master-page-name="PageStyle_5f_ESTADO_20_GyP">
      <style:table-properties table:display="true" style:writing-mode="lr-tb" table:tab-color="#604a7b"/>
    </style:style>
    <style:style style:name="ta20" style:family="table" style:master-page-name="PageStyle_5f_FLUJO_20_DE_20_CAJA_20_">
      <style:table-properties table:display="true" style:writing-mode="lr-tb" table:tab-color="#604a7b"/>
    </style:style>
    <style:style style:name="ta21" style:family="table" style:master-page-name="PageStyle_5f_ANALISIS_20_SESIB">
      <style:table-properties table:display="true" style:writing-mode="lr-tb" table:tab-color="#604a7b"/>
    </style:style>
    <style:style style:name="ta22" style:family="table" style:master-page-name="PageStyle_5f_INDICADORES">
      <style:table-properties table:display="true" style:writing-mode="lr-tb" table:tab-color="#604a7b"/>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 %</number:text>
    </number:percentage-style>
    <number:time-style style:name="N60">
      <number:hours number:style="long"/>
      <number:text>:</number:text>
      <number:minutes number:style="long"/>
    </number:time-style>
    <style:style style:name="ce1" style:family="table-cell" style:parent-style-name="Default"/>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3" style:family="table-cell" style:parent-style-name="Default" style:data-style-name="N1">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Default">
      <style:table-cell-properties fo:background-color="#0070c0" style:diagonal-bl-tr="none" style:diagonal-tl-br="none" style:text-align-source="fix" style:repeat-content="false" fo:wrap-option="wrap" fo:border="0.74pt solid #0070c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loext:char-complex-color loext:theme-type="light1" loext:color-type="theme"/>
      </style:text-properties>
    </style:style>
    <style:style style:name="ce5" style:family="table-cell" style:parent-style-name="Default">
      <style:table-cell-properties style:diagonal-bl-tr="none" style:diagonal-tl-br="none" style:text-align-source="fix" style:repeat-content="false" fo:wrap-option="wrap" fo:border="0.74pt solid #0070c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ackground-color="#0070c0" style:diagonal-bl-tr="none" style:diagonal-tl-br="none" style:text-align-source="fix" style:repeat-content="false" fo:wrap-option="wrap" fo:border="0.74pt solid #0070c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0070c0" style:diagonal-bl-tr="none" style:diagonal-tl-br="none" style:text-align-source="value-type" style:repeat-content="false" fo:wrap-option="no-wrap" fo:border="1.76pt solid #0070c0"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light1" loext:color-type="theme"/>
      </style:text-properties>
    </style:style>
    <style:style style:name="ce9" style:family="table-cell" style:parent-style-name="Default">
      <style:table-cell-properties style:diagonal-bl-tr="none" style:diagonal-tl-br="none" style:text-align-source="value-type" style:repeat-content="false" fo:wrap-option="no-wrap" fo:border="1.76pt solid #0070c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e4dfec" style:diagonal-bl-tr="none" style:diagonal-tl-br="none" style:text-align-source="value-type" style:repeat-content="false" fo:wrap-option="no-wrap" fo:border="1.76pt solid #0070c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fo:border-bottom="0.74pt solid #0070c0" fo:background-color="#0070c0" style:diagonal-bl-tr="none" style:diagonal-tl-br="none" style:text-align-source="fix" style:repeat-content="false" fo:wrap-option="no-wrap" fo:border-left="0.74pt solid #0070c0" style:direction="ltr" fo:border-right="0.74pt solid #ffffff" style:rotation-angle="0" style:rotation-align="none" style:shrink-to-fit="false" fo:border-top="0.74pt solid #0070c0" style:vertical-align="middle" loext:vertical-justify="auto">
        <loext:border-right-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2" style:family="table-cell" style:parent-style-name="Default">
      <style:table-cell-properties style:diagonal-bl-tr="none" style:diagonal-tl-br="none" style:text-align-source="fix" style:repeat-content="false" fo:wrap-option="wrap" fo:border="0.74pt solid #0070c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none" style:diagonal-bl-tr="none" style:diagonal-tl-br="none" style:text-align-source="fix" style:repeat-content="false" fo:wrap-option="wrap" fo:border-left="0.74pt solid #0070c0" style:direction="ltr" fo:border-right="0.74pt solid #0070c0" style:rotation-angle="0" style:rotation-align="none" style:shrink-to-fit="false" fo:border-top="none" style:vertical-align="middle" loext:vertical-justify="auto"/>
      <style:paragraph-properties fo:text-align="center" css3t:text-justify="auto" fo:margin-left="0cm" style:writing-mode="page"/>
    </style:style>
    <style:style style:name="ce14" style:family="table-cell" style:parent-style-name="Default">
      <style:table-cell-properties fo:border-bottom="0.74pt solid #0070c0" style:diagonal-bl-tr="none" style:diagonal-tl-br="none" style:text-align-source="fix" style:repeat-content="false" fo:wrap-option="wrap" fo:border-left="0.74pt solid #0070c0" style:direction="ltr" fo:border-right="0.74pt solid #0070c0" style:rotation-angle="0" style:rotation-align="none" style:shrink-to-fit="false" fo:border-top="none" style:vertical-align="middle" loext:vertical-justify="auto"/>
      <style:paragraph-properties fo:text-align="center" css3t:text-justify="auto" fo:margin-left="0cm" style:writing-mode="page"/>
    </style:style>
    <style:style style:name="ce15" style:family="table-cell" style:parent-style-name="Default">
      <style:table-cell-properties fo:border-bottom="0.74pt solid #0070c0" style:diagonal-bl-tr="none" style:diagonal-tl-br="none" fo:border-left="0.74pt solid #0070c0" fo:border-right="none" style:rotation-align="none" fo:border-top="0.74pt solid #0070c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style:diagonal-bl-tr="none" style:diagonal-tl-br="none" style:text-align-source="value-type" style:repeat-content="false" fo:wrap-option="wrap" fo:border="0.74pt solid #0070c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data-style-name="N11">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18" style:family="table-cell" style:parent-style-name="Default">
      <style:table-cell-properties style:diagonal-bl-tr="none" style:diagonal-tl-br="none" style:text-align-source="value-type" style:repeat-content="false" fo:wrap-option="wrap" fo:border="0.74pt solid #0070c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ackground-color="#0070c0" style:diagonal-bl-tr="none" style:diagonal-tl-br="none" style:text-align-source="fix" style:repeat-content="false" fo:wrap-option="wrap" fo:border="1.76pt solid #0070c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light1" loext:color-type="theme"/>
      </style:text-properties>
    </style:style>
    <style:style style:name="ce20" style:family="table-cell" style:parent-style-name="Default" style:data-style-name="N3">
      <style:table-cell-properties style:diagonal-bl-tr="none" style:diagonal-tl-br="none" style:text-align-source="fix" style:repeat-content="false" fo:wrap-option="no-wrap" fo:border="1.76pt solid #0070c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data-style-name="N3">
      <style:table-cell-properties fo:background-color="#e4dfec" style:diagonal-bl-tr="none" style:diagonal-tl-br="none" style:text-align-source="fix" style:repeat-content="false" fo:wrap-option="no-wrap" fo:border="1.76pt solid #0070c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fo:border-bottom="0.74pt solid #0070c0" fo:background-color="#0070c0" style:diagonal-bl-tr="none" style:diagonal-tl-br="none" style:text-align-source="fix" style:repeat-content="false" fo:wrap-option="wrap" fo:border-left="0.74pt solid #ffffff" style:direction="ltr" fo:border-right="0.74pt solid #ffffff" style:rotation-angle="0" style:rotation-align="none" style:shrink-to-fit="false" fo:border-top="0.74pt solid #0070c0" style:vertical-align="bottom" loext:vertical-justify="auto">
        <loext:border-left-complex-color loext:theme-type="light1" loext:color-type="theme"/>
        <loext:border-right-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3" style:family="table-cell" style:parent-style-name="Default">
      <style:table-cell-properties style:diagonal-bl-tr="none" style:diagonal-tl-br="none" fo:border="0.74pt solid #0070c0"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0.74pt solid #0070c0" style:diagonal-bl-tr="none" style:diagonal-tl-br="none" fo:border-left="none" fo:border-right="none" style:rotation-align="none" fo:border-top="0.74pt solid #0070c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fo:background-color="#0070c0" style:diagonal-bl-tr="none" style:diagonal-tl-br="none" style:text-align-source="fix" style:repeat-content="false" fo:wrap-option="wrap" fo:border="0.74pt solid #0070c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6" style:family="table-cell" style:parent-style-name="Default" style:data-style-name="N3">
      <style:table-cell-properties fo:background-color="#ffffff" style:diagonal-bl-tr="none" style:diagonal-tl-br="none" style:text-align-source="fix" style:repeat-content="false" fo:wrap-option="wrap" fo:border="0.74pt solid #0070c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70c0" fo:background-color="#0070c0" style:diagonal-bl-tr="none" style:diagonal-tl-br="none" style:text-align-source="value-type" style:repeat-content="false" fo:wrap-option="wrap" fo:border-left="0.74pt solid #ffffff" style:direction="ltr" fo:border-right="0.74pt solid #0070c0" style:rotation-angle="0" style:rotation-align="none" style:shrink-to-fit="false" fo:border-top="0.74pt solid #0070c0" style:vertical-align="middle" loext:vertical-justify="auto">
        <loext:border-left-complex-color loext:theme-type="light1" loext:color-type="theme"/>
      </style:table-cell-properties>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8" style:family="table-cell" style:parent-style-name="Default">
      <style:table-cell-properties style:diagonal-bl-tr="none" style:diagonal-tl-br="none" style:text-align-source="fix" style:repeat-content="false" fo:wrap-option="no-wrap" fo:border="0.74pt solid #0070c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3">
      <style:table-cell-properties style:diagonal-bl-tr="none" style:diagonal-tl-br="none" style:text-align-source="fix" style:repeat-content="false" fo:wrap-option="no-wrap" fo:border="0.74pt solid #0070c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31" style:family="table-cell" style:parent-style-name="Default" style:data-style-name="N3">
      <style:table-cell-properties style:diagonal-bl-tr="none" style:diagonal-tl-br="none" style:text-align-source="fix" style:repeat-content="false" fo:wrap-option="wrap" fo:border="0.74pt solid #0070c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Porcentaje_20_2" style:data-style-name="N11">
      <style:table-cell-properties style:cell-protect="protected" style:print-content="true" style:diagonal-bl-tr="none" style:diagonal-tl-br="none" style:text-align-source="fix" style:repeat-content="false" fo:background-color="transparent" fo:wrap-option="no-wrap" fo:border="0.74pt solid #0070c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Porcentaje_20_2" style:data-style-name="N1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5" style:family="table-cell" style:parent-style-name="Default">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36"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3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38"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data-style-name="N3">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4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ackground-color="#dce6f1"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e4dfe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 style:family="table-cell" style:parent-style-name="Default">
      <style:table-cell-properties fo:border-bottom="0.74pt solid #000000" fo:background-color="#0070c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45" style:family="table-cell" style:parent-style-name="Default" style:data-style-name="N1">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46" style:family="table-cell" style:parent-style-name="Default">
      <style:table-cell-properties fo:background-color="#dce6f1"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e4dfe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50"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dark1" loext:color-type="theme"/>
      </style:text-properties>
    </style:style>
    <style:style style:name="ce51" style:family="table-cell" style:parent-style-name="Default">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loext:char-complex-color loext:theme-type="light1" loext:color-type="theme"/>
      </style:text-properties>
    </style:style>
    <style:style style:name="ce52"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loext:char-complex-color loext:theme-type="dark1" loext:color-type="theme"/>
      </style:text-properties>
    </style:style>
    <style:style style:name="ce53" style:family="table-cell" style:parent-style-name="Default">
      <style:table-cell-properties fo:background-color="#dce6f2"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4"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7" style:family="table-cell" style:parent-style-name="Default">
      <style:table-cell-properties fo:background-color="#dbeef4"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5"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loext:char-complex-color loext:theme-type="dark1" loext:color-type="theme"/>
      </style:text-properties>
    </style:style>
    <style:style style:name="ce64" style:family="table-cell" style:parent-style-name="Default">
      <style:table-cell-properties fo:background-color="#0070c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loext:char-complex-color loext:theme-type="light1" loext:color-type="theme"/>
      </style:text-properties>
    </style:style>
    <style:style style:name="ce6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6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loext:char-complex-color loext:theme-type="dark1" loext:color-type="theme"/>
      </style:text-properties>
    </style:style>
    <style:style style:name="ce67" style:family="table-cell" style:parent-style-name="Default">
      <style:table-cell-properties fo:background-color="#0070c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loext:char-complex-color loext:theme-type="light1" loext:color-type="theme"/>
      </style:text-properties>
    </style:style>
    <style:style style:name="ce6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69" style:family="table-cell" style:parent-style-name="Default">
      <style:table-cell-properties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70"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2"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1" style:family="table-cell" style:parent-style-name="Default" style:data-style-name="N1">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2"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2" style:family="table-cell" style:parent-style-name="Default">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loext:char-complex-color loext:theme-type="light1" loext:color-type="theme"/>
      </style:text-properties>
    </style:style>
    <style:style style:name="ce73" style:family="table-cell" style:parent-style-name="Default" style:data-style-name="N1">
      <style:table-cell-properties fo:background-color="#fcd5b5"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6"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7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75" style:family="table-cell" style:parent-style-name="Default">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justify"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loext:char-complex-color loext:theme-type="light1" loext:color-type="theme"/>
      </style:text-properties>
    </style:style>
    <style:style style:name="ce76" style:family="table-cell" style:parent-style-name="Default" style:data-style-name="N1">
      <style:table-cell-properties fo:background-color="#b3a2c7"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4"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7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78" style:family="table-cell" style:parent-style-name="Default">
      <style:table-cell-properties fo:border-bottom="0.74pt solid #000000" fo:background-color="#0070c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ffffff"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loext:char-complex-color loext:theme-type="light1" loext:color-type="theme"/>
      </style:text-properties>
    </style:style>
    <style:style style:name="ce79" style:family="table-cell" style:parent-style-name="Default">
      <style:table-cell-properties fo:background-color="#0070c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loext:char-complex-color loext:theme-type="light1" loext:color-type="theme"/>
      </style:text-properties>
    </style:style>
    <style:style style:name="ce80" style:family="table-cell" style:parent-style-name="Default" style:data-style-name="N3">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1" style:family="table-cell" style:parent-style-name="Default" style:data-style-name="N3">
      <style:table-cell-properties fo:background-color="#dce6f2"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82" style:family="table-cell" style:parent-style-name="Default">
      <style:table-cell-properties fo:border-bottom="0.74pt solid #000000" fo:background-color="#dbeef4"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loext:background-complex-color loext:theme-type="accent5"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3" style:family="table-cell" style:parent-style-name="Default">
      <style:table-cell-properties fo:border-bottom="0.74pt solid #000000" fo:background-color="#eeece1"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light2"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4" style:family="table-cell" style:parent-style-name="Default" style:data-style-name="N1">
      <style:table-cell-properties fo:border-bottom="0.74pt solid #000000" fo:background-color="#eeece1"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light2"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5" style:family="table-cell" style:parent-style-name="Default">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loext:char-complex-color loext:theme-type="light1" loext:color-type="theme"/>
      </style:text-properties>
    </style:style>
    <style:style style:name="ce86" style:family="table-cell" style:parent-style-name="Default">
      <style:table-cell-properties fo:border-bottom="0.74pt solid #000000" fo:background-color="#0070c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loext:char-complex-color loext:theme-type="light1" loext:color-type="theme"/>
      </style:text-properties>
    </style:style>
    <style:style style:name="ce87" style:family="table-cell" style:parent-style-name="Default" style:data-style-name="N1">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8" style:family="table-cell" style:parent-style-name="Default" style:data-style-name="N1">
      <style:table-cell-properties fo:background-color="#dce6f2"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89" style:family="table-cell" style:parent-style-name="Porcentaje_20_2"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0" style:family="table-cell" style:parent-style-name="Default">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light1" loext:color-type="theme"/>
      </style:text-properties>
    </style:style>
    <style:style style:name="ce91"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2" style:family="table-cell" style:parent-style-name="Default">
      <style:table-cell-properties fo:border-bottom="0.74pt solid #000000" fo:background-color="#0070c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light1" loext:color-type="theme"/>
      </style:text-properties>
    </style:style>
    <style:style style:name="ce93" style:family="table-cell" style:parent-style-name="Default" style:data-style-name="N1">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4" style:family="table-cell" style:parent-style-name="Default" style:data-style-name="N11">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5" style:family="table-cell" style:parent-style-name="Default" style:data-style-name="N1">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loext:char-complex-color loext:theme-type="dark1" loext:color-type="theme"/>
      </style:text-properties>
    </style:style>
    <style:style style:name="ce9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9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100" style:family="table-cell" style:parent-style-name="Default" style:data-style-name="N138">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101" style:family="table-cell" style:parent-style-name="Default" style:data-style-name="N1">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02" style:family="table-cell" style:parent-style-name="Default" style:data-style-name="N1">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103"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10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105" style:family="table-cell" style:parent-style-name="Default" style:data-style-name="N147">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106"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10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ce108"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9"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11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111"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112"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justify"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113" style:family="table-cell" style:parent-style-name="Default" style:data-style-name="N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114" style:family="table-cell" style:parent-style-name="Default">
      <style:table-cell-properties fo:background-color="#ffffff" style:rotation-align="none">
        <loext:background-complex-color loext:theme-type="light1" loext:color-type="theme"/>
      </style:table-cell-properties>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1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7" style:family="table-cell" style:parent-style-name="Default">
      <style:table-cell-properties fo:background-color="transparent"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118" style:family="table-cell" style:parent-style-name="Normal_20_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9" style:family="table-cell" style:parent-style-name="Normal_20_4">
      <style:table-cell-properties fo:background-color="#dce6f2"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120" style:family="table-cell" style:parent-style-name="Normal_20_4">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light1" loext:color-type="theme"/>
      </style:text-properties>
    </style:style>
    <style:style style:name="ce121" style:family="table-cell" style:parent-style-name="Normal_20_4">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22" style:family="table-cell" style:parent-style-name="Normal_20_4">
      <style:table-cell-properties style:diagonal-bl-tr="none" style:diagonal-tl-br="none" style:text-align-source="fix" style:repeat-content="false" fo:wrap-option="wrap" fo:border="0.74pt solid #000000" style:direction="ltr" style:rotation-angle="90" style:rotation-align="bottom"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23" style:family="table-cell" style:parent-style-name="Normal_20_4">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4" style:family="table-cell" style:parent-style-name="Normal_20_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25" style:family="table-cell" style:parent-style-name="Normal_20_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26" style:family="table-cell" style:parent-style-name="Normal_20_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7" style:family="table-cell" style:parent-style-name="Normal_20_4" style:data-style-name="N1">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8" style:family="table-cell" style:parent-style-name="Normal_20_4">
      <style:table-cell-properties fo:background-color="#b7dee8"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5"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9" style:family="table-cell" style:parent-style-name="Normal_20_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Normal_20_4">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Normal_20_4">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Normal_20_4" style:data-style-name="N1">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3" style:family="table-cell" style:parent-style-name="Normal_20_4"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Normal_20_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Normal_20_4" style:data-style-name="N6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Normal_20_4"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Normal_20_4">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8" style:family="table-cell" style:parent-style-name="Normal_20_4" style:data-style-name="N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9" style:family="table-cell" style:parent-style-name="Normal_20_4">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40" style:family="table-cell" style:parent-style-name="Normal_20_4">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41" style:family="table-cell" style:parent-style-name="Normal_20_4" style:data-style-name="N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42" style:family="table-cell" style:parent-style-name="Normal_20_4">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3" style:family="table-cell" style:parent-style-name="Normal_20_4" style:data-style-name="N1">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4" style:family="table-cell" style:parent-style-name="Normal_20_4" style:data-style-name="N1">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5" style:family="table-cell" style:parent-style-name="Normal_20_4" style:data-style-name="N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46" style:family="table-cell" style:parent-style-name="Normal_20_4" style:data-style-name="N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7" style:family="table-cell" style:parent-style-name="Normal_20_4">
      <style:table-cell-properties fo:background-color="#0070c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light1" loext:color-type="theme"/>
      </style:text-properties>
    </style:style>
    <style:style style:name="ce148" style:family="table-cell" style:parent-style-name="Normal_20_4" style:data-style-name="N1">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49" style:family="table-cell" style:parent-style-name="Normal_20_4" style:data-style-name="N1">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50" style:family="table-cell" style:parent-style-name="Normal_20_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51" style:family="table-cell" style:parent-style-name="Normal_20_4">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2" style:family="table-cell" style:parent-style-name="Normal_20_4" style:data-style-name="N1">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3" style:family="table-cell" style:parent-style-name="Normal_20_4" style:data-style-name="N2">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54" style:family="table-cell" style:parent-style-name="Normal_20_4" style:data-style-name="N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55" style:family="table-cell" style:parent-style-name="Normal_20_4">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6" style:family="table-cell" style:parent-style-name="Normal_20_4"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7" style:family="table-cell" style:parent-style-name="Normal_20_4"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8" style:family="table-cell" style:parent-style-name="Normal_20_4">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9" style:family="table-cell" style:parent-style-name="Normal_20_4">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loext:char-complex-color loext:theme-type="dark1" loext:color-type="theme"/>
      </style:text-properties>
    </style:style>
    <style:style style:name="ce160" style:family="table-cell" style:parent-style-name="Normal_20_4">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light1" loext:color-type="theme"/>
      </style:text-properties>
    </style:style>
    <style:style style:name="ce161" style:family="table-cell" style:parent-style-name="Normal_20_4">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162" style:family="table-cell" style:parent-style-name="Normal_20_4">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3" style:family="table-cell" style:parent-style-name="Normal_20_4">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4" style:family="table-cell" style:parent-style-name="Normal_20_4">
      <style:table-cell-properties fo:background-color="#0070c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light1" loext:color-type="theme"/>
      </style:text-properties>
    </style:style>
    <style:style style:name="ce165" style:family="table-cell" style:parent-style-name="Normal_20_4">
      <style:table-cell-properties fo:border-bottom="0.74pt solid #000000" fo:background-color="#0070c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light1" loext:color-type="theme"/>
      </style:text-properties>
    </style:style>
    <style:style style:name="ce166" style:family="table-cell" style:parent-style-name="Normal_20_4">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7" style:family="table-cell" style:parent-style-name="Normal_20_4">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Normal_20_4">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Normal_20_4">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loext:char-complex-color loext:theme-type="dark1" loext:color-type="theme"/>
      </style:text-properties>
    </style:style>
    <style:style style:name="ce170" style:family="table-cell" style:parent-style-name="Normal_20_4"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171" style:family="table-cell" style:parent-style-name="Normal_20_4"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172" style:family="table-cell" style:parent-style-name="Normal_20_4" style:data-style-name="N4">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3" style:family="table-cell" style:parent-style-name="Normal_20_4" style:data-style-name="N4">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4" style:family="table-cell" style:parent-style-name="Normal_20_4">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175" style:family="table-cell" style:parent-style-name="Normal_20_4">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176" style:family="table-cell" style:parent-style-name="Normal_20_4">
      <style:table-cell-properties fo:border-bottom="0.74pt solid #000000" fo:background-color="#0070c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light1" loext:color-type="theme"/>
      </style:text-properties>
    </style:style>
    <style:style style:name="ce177" style:family="table-cell" style:parent-style-name="Normal_20_4">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8" style:family="table-cell" style:parent-style-name="Normal_20_4">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9" style:family="table-cell" style:parent-style-name="Normal_20_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80" style:family="table-cell" style:parent-style-name="Normal_20_4">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loext:char-complex-color loext:theme-type="light1" loext:color-type="theme"/>
      </style:text-properties>
    </style:style>
    <style:style style:name="ce181" style:family="table-cell" style:parent-style-name="Normal_20_4">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loext:char-complex-color loext:theme-type="dark1" loext:color-type="theme"/>
      </style:text-properties>
    </style:style>
    <style:style style:name="ce182" style:family="table-cell" style:parent-style-name="Normal_20_4">
      <style:table-cell-properties fo:border-bottom="0.74pt solid #000000" fo:background-color="#0070c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light1" loext:color-type="theme"/>
      </style:text-properties>
    </style:style>
    <style:style style:name="ce183" style:family="table-cell" style:parent-style-name="Normal_20_4" style:data-style-name="N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loext:char-complex-color loext:theme-type="dark1" loext:color-type="theme"/>
      </style:text-properties>
    </style:style>
    <style:style style:name="ce184" style:family="table-cell" style:parent-style-name="Normal_20_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dark1" loext:color-type="theme"/>
      </style:text-properties>
    </style:style>
    <style:style style:name="ce185" style:family="table-cell" style:parent-style-name="Normal_20_4">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Normal_20_4">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7" style:family="table-cell" style:parent-style-name="Normal_20_4">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Normal_20_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Normal_20_4">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90" style:family="table-cell" style:parent-style-name="Normal_20_4" style:data-style-name="N4">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1" style:family="table-cell" style:parent-style-name="Porcentaje_20_2"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92" style:family="table-cell" style:parent-style-name="Normal_20_4">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light1" loext:color-type="theme"/>
      </style:text-properties>
    </style:style>
    <style:style style:name="ce193" style:family="table-cell" style:parent-style-name="Normal_20_4"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4" style:family="table-cell" style:parent-style-name="Normal_20_4"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5" style:family="table-cell" style:parent-style-name="Normal_20_4">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light1" loext:color-type="theme"/>
      </style:text-properties>
    </style:style>
    <style:style style:name="ce196" style:family="table-cell" style:parent-style-name="Normal_20_4" style:data-style-name="N4">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7" style:family="table-cell" style:parent-style-name="Normal_20_4">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light1" loext:color-type="theme"/>
      </style:text-properties>
    </style:style>
    <style:style style:name="ce198" style:family="table-cell" style:parent-style-name="Normal_20_4">
      <style:table-cell-properties style:diagonal-bl-tr="none" style:diagonal-tl-br="none" fo:background-color="transparent"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99" style:family="table-cell" style:parent-style-name="Normal_20_4">
      <style:table-cell-properties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200" style:family="table-cell" style:parent-style-name="Normal_20_4">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01" style:family="table-cell" style:parent-style-name="Normal_20_4">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2" style:family="table-cell" style:parent-style-name="Normal_20_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3" style:family="table-cell" style:parent-style-name="Normal_20_4" style:data-style-name="N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4" style:family="table-cell" style:parent-style-name="Normal_20_4" style:data-style-name="N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5" style:family="table-cell" style:parent-style-name="Normal_20_4" style:data-style-name="N3">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Normal_20_4">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207" style:family="table-cell" style:parent-style-name="Normal_20_4">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208" style:family="table-cell" style:parent-style-name="Normal_20_4">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209" style:family="table-cell" style:parent-style-name="Normal_20_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210" style:family="table-cell" style:parent-style-name="Normal_20_4">
      <style:table-cell-properties fo:background-color="transparent"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211" style:family="table-cell" style:parent-style-name="Normal_20_4" style:data-style-name="N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212" style:family="table-cell" style:parent-style-name="Normal_20_4" style:data-style-name="N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213" style:family="table-cell" style:parent-style-name="Normal_20_4" style:data-style-name="N3">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214" style:family="table-cell" style:parent-style-name="Normal_20_4">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dark1" loext:color-type="theme"/>
      </style:text-properties>
    </style:style>
    <style:style style:name="ce215" style:family="table-cell" style:parent-style-name="Normal_20_4">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216" style:family="table-cell" style:parent-style-name="Normal_20_4">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217" style:family="table-cell" style:parent-style-name="Normal_20_4">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8" style:family="table-cell" style:parent-style-name="Normal_20_4" style:data-style-name="N3">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219" style:family="table-cell" style:parent-style-name="Normal_20_4">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22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2" style:family="table-cell" style:parent-style-name="Default">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justify"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223"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6" style:family="table-cell" style:parent-style-name="Default">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227" style:family="table-cell" style:parent-style-name="Default">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light1" loext:color-type="theme"/>
      </style:text-properties>
    </style:style>
    <style:style style:name="ce228" style:family="table-cell" style:parent-style-name="Excel_20_Built-in_20_Comma" style:data-style-name="N135">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 style:family="table-cell" style:parent-style-name="Excel_20_Built-in_20_Comma" style:data-style-name="N3">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 style:family="table-cell" style:parent-style-name="Excel_20_Built-in_20_Comma" style:data-style-name="N135">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1" style:family="table-cell" style:parent-style-name="Excel_20_Built-in_20_Comma" style:data-style-name="N3">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2" style:family="table-cell" style:parent-style-name="Default" style:data-style-name="N135">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3"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4" style:family="table-cell" style:parent-style-name="Excel_20_Built-in_20_Comma" style:data-style-name="N4">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5"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6" style:family="table-cell" style:parent-style-name="Default" style:data-style-name="N13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7" style:family="table-cell" style:parent-style-name="Excel_20_Built-in_20_Percent" style:data-style-name="N1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8" style:family="table-cell" style:parent-style-name="Default" style:data-style-name="N133">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9"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24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3"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6"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7"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style>
    <style:style style:name="ce24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0"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style>
    <style:style style:name="ce25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25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6"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7"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259"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26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2"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3"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4" style:family="table-cell" style:parent-style-name="Default" style:data-style-name="N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5"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6" style:family="table-cell" style:parent-style-name="Default" style:data-style-name="N2">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8" style:family="table-cell" style:parent-style-name="Excel_20_Built-in_20_Comma" style:data-style-name="N135">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9" style:family="table-cell" style:parent-style-name="Excel_20_Built-in_20_Comma" style:data-style-name="N135">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0"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style>
    <style:style style:name="ce271" style:family="table-cell" style:parent-style-name="Default" style:data-style-name="N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27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3" style:family="table-cell" style:parent-style-name="Default" style:data-style-name="N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4" style:family="table-cell" style:parent-style-name="Default" style:data-style-name="N135">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ce27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9" style:family="table-cell" style:parent-style-name="Default" style:data-style-name="N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0"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8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8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4" style:family="table-cell" style:parent-style-name="Default" style:data-style-name="N1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style>
    <style:style style:name="ce28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8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9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91" style:family="table-cell" style:parent-style-name="Default">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light1" loext:color-type="theme"/>
      </style:text-properties>
    </style:style>
    <style:style style:name="ce29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9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94"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9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9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97" style:family="table-cell" style:parent-style-name="Default">
      <style:table-cell-properties fo:border-bottom="none" fo:background-color="#0070c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light1" loext:color-type="theme"/>
      </style:text-properties>
    </style:style>
    <style:style style:name="ce29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99"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00" style:family="table-cell" style:parent-style-name="Default">
      <style:table-cell-properties fo:background-color="#0070c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light1" loext:color-type="theme"/>
      </style:text-properties>
    </style:style>
    <style:style style:name="ce301"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0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03"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0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05"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06"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07" style:family="table-cell" style:parent-style-name="Default" style:data-style-name="N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0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0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10" style:family="table-cell" style:parent-style-name="Default">
      <style:table-cell-properties fo:background-color="#0070c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light1" loext:color-type="theme"/>
      </style:text-properties>
    </style:style>
    <style:style style:name="ce311" style:family="table-cell" style:parent-style-name="Millares_20_2" style:data-style-name="N2">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12" style:family="table-cell" style:parent-style-name="Excel_20_Built-in_20_Comma" style:data-style-name="N2">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13" style:family="table-cell" style:parent-style-name="Excel_20_Built-in_20_Comma" style:data-style-name="N135">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14" style:family="table-cell" style:parent-style-name="Default" style:data-style-name="N133">
      <style:table-cell-properties style:diagonal-bl-tr="none" style:diagonal-tl-br="none" fo:background-color="transparent" fo:border="0.74pt solid #000000" style:rotation-align="non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15" style:family="table-cell" style:parent-style-name="Default" style:data-style-name="N133">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16" style:family="table-cell" style:parent-style-name="Excel_20_Built-in_20_Comma" style:data-style-name="N135">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17" style:family="table-cell" style:parent-style-name="Excel_20_Built-in_20_Comma" style:data-style-name="N135">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18" style:family="table-cell" style:parent-style-name="Default" style:data-style-name="N13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19" style:family="table-cell" style:parent-style-name="Default">
      <style:table-cell-properties fo:border-bottom="none" fo:background-color="#0070c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light1" loext:color-type="theme"/>
      </style:text-properties>
    </style:style>
    <style:style style:name="ce320" style:family="table-cell" style:parent-style-name="Excel_20_Built-in_20_Comma" style:data-style-name="N135">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21" style:family="table-cell" style:parent-style-name="Excel_20_Built-in_20_Comma" style:data-style-name="N2">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22" style:family="table-cell" style:parent-style-name="Default" style:data-style-name="N133">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3" style:family="table-cell" style:parent-style-name="Default" style:data-style-name="N133">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4" style:family="table-cell" style:parent-style-name="Default" style:data-style-name="N133">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2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2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2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28" style:family="table-cell" style:parent-style-name="Default" style:data-style-name="N127">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29" style:family="table-cell" style:parent-style-name="Default" style:data-style-name="N133">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30" style:family="table-cell" style:parent-style-name="Default" style:data-style-name="N13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31" style:family="table-cell" style:parent-style-name="Default" style:data-style-name="N4">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32" style:family="table-cell" style:parent-style-name="Excel_20_Built-in_20_Comma" style:data-style-name="N13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33" style:family="table-cell" style:parent-style-name="Excel_20_Built-in_20_Comma" style:data-style-name="N13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34" style:family="table-cell" style:parent-style-name="Default" style:data-style-name="N133">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35" style:family="table-cell" style:parent-style-name="Default" style:data-style-name="N13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36" style:family="table-cell" style:parent-style-name="Default">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37"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3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39"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41"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42" style:family="table-cell" style:parent-style-name="Excel_20_Built-in_20_Comma" style:data-style-name="N135">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3" style:family="table-cell" style:parent-style-name="Excel_20_Built-in_20_Comma" style:data-style-name="N135">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44"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45" style:family="table-cell" style:parent-style-name="Default" style:data-style-name="N133">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6"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47"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48"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49"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5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4" style:family="table-cell" style:parent-style-name="Excel_20_Built-in_20_Comma" style:data-style-name="N135">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5" style:family="table-cell" style:parent-style-name="Excel_20_Built-in_20_Comma" style:data-style-name="N135">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6" style:family="table-cell" style:parent-style-name="Excel_20_Built-in_20_Comma" style:data-style-name="N135">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7" style:family="table-cell" style:parent-style-name="Default" style:data-style-name="N133">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8" style:family="table-cell" style:parent-style-name="Default" style:data-style-name="N135">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0" style:family="table-cell" style:parent-style-name="Default">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61" style:family="table-cell" style:parent-style-name="Default" style:data-style-name="N133">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62" style:family="table-cell" style:parent-style-name="Default">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363" style:family="table-cell" style:parent-style-name="Default">
      <style:table-cell-properties style:diagonal-bl-tr="none" style:diagonal-tl-br="none" fo:border="0.74pt solid #000000" style:rotation-align="none"/>
    </style:style>
    <style:style style:name="ce364" style:family="table-cell" style:parent-style-name="Default">
      <style:table-cell-properties style:diagonal-bl-tr="none" style:diagonal-tl-br="none" fo:border="none" style:rotation-align="none"/>
    </style:style>
    <style:style style:name="ce365" style:family="table-cell" style:parent-style-name="Default">
      <style:table-cell-properties style:diagonal-bl-tr="none" style:diagonal-tl-br="none" style:text-align-source="fix" style:repeat-content="false" fo:wrap-option="wrap" fo:border="1.76pt solid #ffc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6" style:family="table-cell" style:parent-style-name="Default">
      <style:table-cell-properties style:diagonal-bl-tr="none" style:diagonal-tl-br="none" style:text-align-source="fix" style:repeat-content="false" fo:background-color="transparent"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67" style:family="table-cell" style:parent-style-name="Default">
      <style:table-cell-properties fo:border-bottom="0.74pt solid #000000" fo:background-color="#0070c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368" style:family="table-cell" style:parent-style-name="Default" style:data-style-name="N138">
      <style:table-cell-properties style:diagonal-bl-tr="none" style:diagonal-tl-br="none" fo:border="0.74pt solid #000000" style:rotation-align="none"/>
    </style:style>
    <style:style style:name="ce369" style:family="table-cell" style:parent-style-name="Default">
      <style:table-cell-properties fo:border-bottom="1.76pt solid #ffc000" style:diagonal-bl-tr="none" style:diagonal-tl-br="none" style:text-align-source="fix" style:repeat-content="false" fo:wrap-option="wrap" fo:border-left="1.76pt solid #00b0f0" style:direction="ltr" fo:border-right="1.76pt solid #00b0f0" style:rotation-angle="0" style:rotation-align="none" style:shrink-to-fit="false" fo:border-top="1.76pt solid #ffc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0" style:family="table-cell" style:parent-style-name="Default">
      <style:table-cell-properties fo:border-bottom="none" fo:background-color="#0070c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light1" loext:color-type="theme"/>
      </style:text-properties>
    </style:style>
    <style:style style:name="ce371"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72"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3" style:family="table-cell" style:parent-style-name="Excel_20_Built-in_20_Comma" style:data-style-name="N2">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74" style:family="table-cell" style:parent-style-name="Excel_20_Built-in_20_Comma" style:data-style-name="N2">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5" style:family="table-cell" style:parent-style-name="Default">
      <style:table-cell-properties fo:border-bottom="1.76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7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77" style:family="table-cell" style:parent-style-name="Default">
      <style:table-cell-properties fo:border-bottom="none" fo:background-color="#0070c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light1" loext:color-type="theme"/>
      </style:text-properties>
    </style:style>
    <style:style style:name="ce378"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9"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light1" loext:color-type="theme"/>
      </style:text-properties>
    </style:style>
    <style:style style:name="ce380" style:family="table-cell" style:parent-style-name="Excel_20_Built-in_20_Comma" style:data-style-name="N135">
      <style:table-cell-properties fo:border-bottom="none" style:cell-protect="protected" style:print-content="tru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81" style:family="table-cell" style:parent-style-name="Excel_20_Built-in_20_Comma" style:data-style-name="N135">
      <style:table-cell-properties fo:border-bottom="none" style:cell-protect="protected" style:print-content="tru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2" style:family="table-cell" style:parent-style-name="Default">
      <style:table-cell-properties fo:border-bottom="none" style:diagonal-bl-tr="none" style:diagonal-tl-br="none" fo:background-color="transparent" fo:border-left="0.74pt solid #000000" fo:border-right="none" style:rotation-align="none" fo:border-top="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light1" loext:color-type="theme"/>
      </style:text-properties>
    </style:style>
    <style:style style:name="ce384" style:family="table-cell" style:parent-style-name="Excel_20_Built-in_20_Comma" style:data-style-name="N13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85" style:family="table-cell" style:parent-style-name="Excel_20_Built-in_20_Comma" style:data-style-name="N13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6" style:family="table-cell" style:parent-style-name="Default">
      <style:table-cell-properties fo:border-bottom="1.76pt solid #ffc000" style:diagonal-bl-tr="none" style:diagonal-tl-br="none" style:text-align-source="fix" style:repeat-content="false" fo:wrap-option="wrap" fo:border-left="1.76pt solid #00b0f0" style:direction="ltr" fo:border-right="1.76pt solid #ffc000" style:rotation-angle="0" style:rotation-align="none" style:shrink-to-fit="false" fo:border-top="1.76pt solid #ffc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7" style:family="table-cell" style:parent-style-name="Default">
      <style:table-cell-properties fo:border-bottom="1.76pt solid #000000" style:diagonal-bl-tr="none" style:diagonal-tl-br="none" style:text-align-source="fix" style:repeat-content="false" fo:background-color="transparent" fo:wrap-option="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88"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9"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0" style:family="table-cell" style:parent-style-name="Default">
      <style:table-cell-properties fo:border-bottom="0.74pt solid #000000" fo:background-color="#00b0f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1" style:family="table-cell" style:parent-style-name="Default">
      <style:table-cell-properties style:diagonal-bl-tr="none" style:diagonal-tl-br="none" fo:background-color="transparent" fo:border="0.74pt solid #000000" style:rotation-align="non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2" style:family="table-cell" style:parent-style-name="Default">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3" style:family="table-cell" style:parent-style-name="Default">
      <style:table-cell-properties style:diagonal-bl-tr="none" style:diagonal-tl-br="none" fo:background-color="transparent" fo:border="0.74pt solid #000000"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394" style:family="table-cell" style:parent-style-name="Default">
      <style:table-cell-properties style:diagonal-bl-tr="none" style:diagonal-tl-br="none" fo:background-color="transparent"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395" style:family="table-cell" style:parent-style-name="Default">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6" style:family="table-cell" style:parent-style-name="Default">
      <style:table-cell-properties fo:border-bottom="0.74pt solid #000000" style:diagonal-bl-tr="none" style:diagonal-tl-br="none" fo:background-color="transparent"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7" style:family="table-cell" style:parent-style-name="Default">
      <style:table-cell-properties fo:background-color="#b7dee8" style:diagonal-bl-tr="none" style:diagonal-tl-br="none" fo:border="0.74pt solid #000000" style:rotation-align="none">
        <loext:background-complex-color loext:theme-type="accent5" loext:color-type="theme">
          <loext:transformation loext:type="lummod" loext:value="4000"/>
          <loext:transformation loext:type="lumoff" loext:value="5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8" style:family="table-cell" style:parent-style-name="Default" style:data-style-name="N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9"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0" style:family="table-cell" style:parent-style-name="Excel_20_Built-in_20_Comma" style:data-style-name="N2">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1" style:family="table-cell" style:parent-style-name="Excel_20_Built-in_20_Comma" style:data-style-name="N2">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2" style:family="table-cell" style:parent-style-name="Default" style:data-style-name="N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403" style:family="table-cell" style:parent-style-name="Default" style:data-style-name="N2">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404" style:family="table-cell" style:parent-style-name="Excel_20_Built-in_20_Comma" style:data-style-name="N2">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405" style:family="table-cell" style:parent-style-name="Default" style:data-style-name="N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406" style:family="table-cell" style:parent-style-name="Default" style:data-style-name="N2">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7" style:family="table-cell" style:parent-style-name="Default" style:data-style-name="N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8" style:family="table-cell" style:parent-style-name="Excel_20_Built-in_20_Comma" style:data-style-name="N4">
      <style:table-cell-properties fo:background-color="#b7dee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5"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9"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0" style:family="table-cell" style:parent-style-name="Default" style:data-style-name="N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1" style:family="table-cell" style:parent-style-name="Excel_20_Built-in_20_Comma" style:data-style-name="N4">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2" style:family="table-cell" style:parent-style-name="Default" style:data-style-name="N4">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413" style:family="table-cell" style:parent-style-name="Default" style:data-style-name="N4">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4" style:family="table-cell" style:parent-style-name="Excel_20_Built-in_20_Comma" style:data-style-name="N4">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415" style:family="table-cell" style:parent-style-name="Default" style:data-style-name="N4">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6" style:family="table-cell" style:parent-style-name="Excel_20_Built-in_20_Comma" style:data-style-name="N4">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7" style:family="table-cell" style:parent-style-name="Default" style:data-style-name="N4">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8"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9" style:family="table-cell" style:parent-style-name="Default" style:data-style-name="N4">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0" style:family="table-cell" style:parent-style-name="Excel_20_Built-in_20_Comma" style:data-style-name="N4">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1"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2"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3" style:family="table-cell" style:parent-style-name="Default" style:data-style-name="N4">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4" style:family="table-cell" style:parent-style-name="Default" style:data-style-name="N4">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5" style:family="table-cell" style:parent-style-name="Default" style:data-style-name="N135">
      <style:table-cell-properties style:rotation-align="non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6" style:family="table-cell" style:parent-style-name="Default" style:data-style-name="N141">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7" style:family="table-cell" style:parent-style-name="Default" style:data-style-name="N133">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29" style:family="table-cell" style:parent-style-name="Default">
      <style:table-cell-properties fo:background-color="#0070c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loext:char-complex-color loext:theme-type="light1" loext:color-type="theme"/>
      </style:text-properties>
    </style:style>
    <style:style style:name="ce430"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31"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loext:char-complex-color loext:theme-type="dark1" loext:color-type="theme"/>
      </style:text-properties>
    </style:style>
    <style:style style:name="ce432"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33"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4" style:family="table-cell" style:parent-style-name="Default">
      <style:table-cell-properties fo:border-bottom="0.74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5"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6" style:family="table-cell" style:parent-style-name="Default">
      <style:table-cell-properties fo:background-color="#0070c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loext:char-complex-color loext:theme-type="light1" loext:color-type="theme"/>
      </style:text-properties>
    </style:style>
    <style:style style:name="ce437" style:family="table-cell" style:parent-style-name="Default">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loext:char-complex-color loext:theme-type="light1" loext:color-type="theme"/>
      </style:text-properties>
    </style:style>
    <style:style style:name="ce438"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3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4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1"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2" style:family="table-cell" style:parent-style-name="Default">
      <style:table-cell-properties fo:border-bottom="0.74pt solid #000000" fo:background-color="#0070c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loext:char-complex-color loext:theme-type="light1" loext:color-type="theme"/>
      </style:text-properties>
    </style:style>
    <style:style style:name="ce443" style:family="table-cell" style:parent-style-name="Default">
      <style:table-cell-properties fo:border-bottom="0.74pt solid #000000" fo:background-color="#0070c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loext:char-complex-color loext:theme-type="light1" loext:color-type="theme"/>
      </style:text-properties>
    </style:style>
    <style:style style:name="ce444" style:family="table-cell" style:parent-style-name="Excel_20_Built-in_20_Comma" style:data-style-name="N4">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5" style:family="table-cell" style:parent-style-name="Excel_20_Built-in_20_Comma" style:data-style-name="N4">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6" style:family="table-cell" style:parent-style-name="Default" style:data-style-name="N4">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loext:char-complex-color loext:theme-type="dark1" loext:color-type="theme"/>
      </style:text-properties>
    </style:style>
    <style:style style:name="ce447" style:family="table-cell" style:parent-style-name="Default" style:data-style-name="N4">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48" style:family="table-cell" style:parent-style-name="Excel_20_Built-in_20_Comma" style:data-style-name="N4">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loext:char-complex-color loext:theme-type="dark1" loext:color-type="theme"/>
      </style:text-properties>
    </style:style>
    <style:style style:name="ce449" style:family="table-cell" style:parent-style-name="Default" style:data-style-name="N4">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50" style:family="table-cell" style:parent-style-name="Default" style:data-style-name="N4">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1" style:family="table-cell" style:parent-style-name="Default" style:data-style-name="N4">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2" style:family="table-cell" style:parent-style-name="Excel_20_Built-in_20_Comma" style:data-style-name="N4">
      <style:table-cell-properties fo:background-color="#0070c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loext:char-complex-color loext:theme-type="light1" loext:color-type="theme"/>
      </style:text-properties>
    </style:style>
    <style:style style:name="ce453"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4" style:family="table-cell" style:parent-style-name="Default" style:data-style-name="N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55" style:family="table-cell" style:parent-style-name="Default" style:data-style-name="N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56" style:family="table-cell" style:parent-style-name="Default" style:data-style-name="N2">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loext:char-complex-color loext:theme-type="light1" loext:color-type="theme"/>
      </style:text-properties>
    </style:style>
    <style:style style:name="ce457" style:family="table-cell" style:parent-style-name="Default" style:data-style-name="N4">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58" style:family="table-cell" style:parent-style-name="Default">
      <style:table-cell-properties fo:background-color="#0070c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loext:char-complex-color loext:theme-type="light1" loext:color-type="theme"/>
      </style:text-properties>
    </style:style>
    <style:style style:name="ce459" style:family="table-cell" style:parent-style-name="Excel_20_Built-in_20_Comma" style:data-style-name="N4">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0" style:family="table-cell" style:parent-style-name="Excel_20_Built-in_20_Comma" style:data-style-name="N4">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1" style:family="table-cell" style:parent-style-name="Default" style:data-style-name="N4">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loext:char-complex-color loext:theme-type="dark1" loext:color-type="theme"/>
      </style:text-properties>
    </style:style>
    <style:style style:name="ce462" style:family="table-cell" style:parent-style-name="Default" style:data-style-name="N4">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3" style:family="table-cell" style:parent-style-name="Excel_20_Built-in_20_Comma" style:data-style-name="N4">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loext:char-complex-color loext:theme-type="dark1" loext:color-type="theme"/>
      </style:text-properties>
    </style:style>
    <style:style style:name="ce464"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5" style:family="table-cell" style:parent-style-name="Default" style:data-style-name="N4">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6" style:family="table-cell" style:parent-style-name="Excel_20_Built-in_20_Comma" style:data-style-name="N4">
      <style:table-cell-properties fo:border-bottom="0.74pt solid #000000" fo:background-color="#0070c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loext:char-complex-color loext:theme-type="light1" loext:color-type="theme"/>
      </style:text-properties>
    </style:style>
    <style:style style:name="ce467" style:family="table-cell" style:parent-style-name="Default">
      <style:table-cell-properties fo:border-bottom="0.74pt solid #000000" fo:background-color="#0070c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loext:char-complex-color loext:theme-type="light1" loext:color-type="theme"/>
      </style:text-properties>
    </style:style>
    <style:style style:name="ce468" style:family="table-cell" style:parent-style-name="Default" style:data-style-name="N4">
      <style:table-cell-properties style:diagonal-bl-tr="none" style:diagonal-tl-br="none" fo:border="0.74pt solid #000000"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9" style:family="table-cell" style:parent-style-name="Default">
      <style:table-cell-properties fo:border-bottom="0.74pt solid #000000" fo:background-color="#0070c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loext:char-complex-color loext:theme-type="light1" loext:color-type="theme"/>
      </style:text-properties>
    </style:style>
    <style:style style:name="ce470" style:family="table-cell" style:parent-style-name="Default" style:data-style-name="N4">
      <style:table-cell-properties style:diagonal-bl-tr="none" style:diagonal-tl-br="none" fo:border="0.74pt solid #000000"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1"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2" style:family="table-cell" style:parent-style-name="Default">
      <style:table-cell-properties fo:border-bottom="0.74pt solid #000000" fo:background-color="#0070c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loext:char-complex-color loext:theme-type="light1" loext:color-type="theme"/>
      </style:text-properties>
    </style:style>
    <style:style style:name="ce473" style:family="table-cell" style:parent-style-name="Default" style:data-style-name="N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7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7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7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7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7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8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8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82" style:family="table-cell" style:parent-style-name="Default" style:data-style-name="N4">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83" style:family="table-cell" style:parent-style-name="Default" style:data-style-name="N4">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8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85"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86" style:family="table-cell" style:parent-style-name="Default">
      <style:table-cell-properties fo:border-bottom="0.74pt solid #000000" fo:background-color="#0070c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loext:char-complex-color loext:theme-type="light1" loext:color-type="theme"/>
      </style:text-properties>
    </style:style>
    <style:style style:name="ce487" style:family="table-cell" style:parent-style-name="Default" style:data-style-name="N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88" style:family="table-cell" style:parent-style-name="Default">
      <style:table-cell-properties fo:border-bottom="0.74pt solid #000000" fo:background-color="#0070c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loext:char-complex-color loext:theme-type="light1" loext:color-type="theme"/>
      </style:text-properties>
    </style:style>
    <style:style style:name="ce48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9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9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92"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93" style:family="table-cell" style:parent-style-name="Default" style:data-style-name="N4">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94"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9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96"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97" style:family="table-cell" style:parent-style-name="Excel_20_Built-in_20_Comma" style:data-style-name="N13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98" style:family="table-cell" style:parent-style-name="Excel_20_Built-in_20_Comma" style:data-style-name="N135">
      <style:table-cell-properties fo:background-color="#0070c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loext:char-complex-color loext:theme-type="light1" loext:color-type="theme"/>
      </style:text-properties>
    </style:style>
    <style:style style:name="ce499" style:family="table-cell" style:parent-style-name="Excel_20_Built-in_20_Comma" style:data-style-name="N135">
      <style:table-cell-properties fo:border-bottom="0.74pt solid #000000" style:cell-protect="protected" style:print-content="tru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00" style:family="table-cell" style:parent-style-name="Excel_20_Built-in_20_Comma" style:data-style-name="N135">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01" style:family="table-cell" style:parent-style-name="Excel_20_Built-in_20_Comma" style:data-style-name="N135">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02" style:family="table-cell" style:parent-style-name="Excel_20_Built-in_20_Comma" style:data-style-name="N13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03" style:family="table-cell" style:parent-style-name="Excel_20_Built-in_20_Percent" style:data-style-name="N1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0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05" style:family="table-cell" style:parent-style-name="Default" style:data-style-name="N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06" style:family="table-cell" style:parent-style-name="Default" style:data-style-name="N127">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0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8" style:family="table-cell" style:parent-style-name="Default">
      <style:table-cell-properties fo:border-bottom="none" fo:background-color="#0070c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509"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10" style:family="table-cell" style:parent-style-name="Default">
      <style:table-cell-properties fo:border-bottom="0.74pt solid #000000" fo:background-color="#0070c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light1" loext:color-type="theme"/>
      </style:text-properties>
    </style:style>
    <style:style style:name="ce511"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12" style:family="table-cell" style:parent-style-name="Default">
      <style:table-cell-properties fo:border-bottom="none"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13"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14" style:family="table-cell" style:parent-style-name="Default">
      <style:table-cell-properties fo:background-color="#ffff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5" style:family="table-cell" style:parent-style-name="Default">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16" style:family="table-cell" style:parent-style-name="Default">
      <style:table-cell-properties style:rotation-align="non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517" style:family="table-cell" style:parent-style-name="Default">
      <style:table-cell-properties fo:background-color="#0070c0" style:diagonal-bl-tr="none" style:diagonal-tl-br="none" fo:border="0.74pt solid #000000" style:rotation-align="non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light1" loext:color-type="theme"/>
      </style:text-properties>
    </style:style>
    <style:style style:name="ce51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9"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0" style:family="table-cell" style:parent-style-name="Excel_20_Built-in_20_Comma" style:data-style-name="N135">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1" style:family="table-cell" style:parent-style-name="Excel_20_Built-in_20_Comma" style:data-style-name="N135">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2" style:family="table-cell" style:parent-style-name="Excel_20_Built-in_20_Comma" style:data-style-name="N13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3"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4" style:family="table-cell" style:parent-style-name="Excel_20_Built-in_20_Comma" style:data-style-name="N135">
      <style:table-cell-properties fo:border-bottom="0.74pt solid #000000" style:cell-protect="protected" style:print-content="tru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5"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26" style:family="table-cell" style:parent-style-name="Excel_20_Built-in_20_Percent" style:data-style-name="N1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27" style:family="table-cell" style:parent-style-name="Default" style:data-style-name="N135">
      <style:table-cell-properties fo:border-bottom="none"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8" style:family="table-cell" style:parent-style-name="Default" style:data-style-name="N133">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9" style:family="table-cell" style:parent-style-name="Default" style:data-style-name="N133">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0" style:family="table-cell" style:parent-style-name="Default">
      <style:table-cell-properties fo:border-bottom="1.76pt solid #000000" fo:background-color="#ffff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1" style:family="table-cell" style:parent-style-name="Default" style:data-style-name="N133">
      <style:table-cell-properties style:diagonal-bl-tr="none" style:diagonal-tl-br="none" fo:border="0.74pt solid #000000"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2" style:family="table-cell" style:parent-style-name="Default" style:data-style-name="N10">
      <style:table-cell-properties style:diagonal-bl-tr="none" style:diagonal-tl-br="none" fo:border="0.74pt solid #000000"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3"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4" style:family="table-cell" style:parent-style-name="Default" style:data-style-name="N117">
      <style:table-cell-properties style:diagonal-bl-tr="none" style:diagonal-tl-br="none" fo:border="0.74pt solid #000000"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5" style:family="table-cell" style:parent-style-name="Default" style:data-style-name="N117">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6" style:family="table-cell" style:parent-style-name="Default">
      <style:table-cell-properties style:rotation-align="non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dark1" loext:color-type="theme"/>
      </style:text-properties>
    </style:style>
    <style:style style:name="ce537" style:family="table-cell" style:parent-style-name="Default">
      <style:table-cell-properties fo:background-color="#0070c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light1" loext:color-type="theme"/>
      </style:text-properties>
    </style:style>
    <style:style style:name="ce538" style:family="table-cell" style:parent-style-name="Excel_20_Built-in_20_Comma" style:data-style-name="N135">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9" style:family="table-cell" style:parent-style-name="Default" style:data-style-name="N13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0" style:family="table-cell" style:parent-style-name="Default" style:data-style-name="N14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42" style:family="table-cell" style:parent-style-name="Default">
      <style:table-cell-properties fo:border-bottom="none" fo:background-color="#0070c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543" style:family="table-cell" style:parent-style-name="Default">
      <style:table-cell-properties fo:border-bottom="0.74pt solid #000000" fo:background-color="#0070c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light1" loext:color-type="theme"/>
      </style:text-properties>
    </style:style>
    <style:style style:name="ce544" style:family="table-cell" style:parent-style-name="Excel_20_Built-in_20_Comma" style:data-style-name="N15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45" style:family="table-cell" style:parent-style-name="Default" style:data-style-name="N10">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6" style:family="table-cell" style:parent-style-name="Excel_20_Built-in_20_Comma" style:data-style-name="N13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light1" loext:color-type="theme"/>
      </style:text-properties>
    </style:style>
    <style:style style:name="ce547" style:family="table-cell" style:parent-style-name="Default" style:data-style-name="N13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light1" loext:color-type="theme"/>
      </style:text-properties>
    </style:style>
    <style:style style:name="ce548" style:family="table-cell" style:parent-style-name="Excel_20_Built-in_20_Comma" style:data-style-name="N135">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light1" loext:color-type="theme"/>
      </style:text-properties>
    </style:style>
    <style:style style:name="ce549" style:family="table-cell" style:parent-style-name="Default" style:data-style-name="N14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light1" loext:color-type="theme"/>
      </style:text-properties>
    </style:style>
    <style:style style:name="ce550" style:family="table-cell" style:parent-style-name="Default">
      <style:table-cell-properties fo:border-bottom="none" fo:background-color="#0070c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551" style:family="table-cell" style:parent-style-name="Excel_20_Built-in_20_Comma" style:data-style-name="N135">
      <style:table-cell-properties fo:border-bottom="0.74pt solid #000000" style:cell-protect="protected" style:print-content="tru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2" style:family="table-cell" style:parent-style-name="Excel_20_Built-in_20_Comma" style:data-style-name="N135">
      <style:table-cell-properties fo:border-bottom="0.74pt solid #000000" style:cell-protect="protected" style:print-content="tru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3" style:family="table-cell" style:parent-style-name="Default" style:data-style-name="N1">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4" style:family="table-cell" style:parent-style-name="Default">
      <style:table-cell-properties fo:background-color="#0070c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light1" loext:color-type="theme"/>
      </style:text-properties>
    </style:style>
    <style:style style:name="ce555" style:family="table-cell" style:parent-style-name="Excel_20_Built-in_20_Comma" style:data-style-name="N135">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56" style:family="table-cell" style:parent-style-name="Excel_20_Built-in_20_Comma" style:data-style-name="N135">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7" style:family="table-cell" style:parent-style-name="Default">
      <style:table-cell-properties style:rotation-align="none"/>
    </style:style>
    <style:style style:name="ce55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559" style:family="table-cell" style:parent-style-name="Default" style:data-style-name="N133">
      <style:table-cell-properties style:rotation-align="none"/>
    </style:style>
    <style:style style:name="ce560" style:family="table-cell" style:parent-style-name="Default" style:data-style-name="N133">
      <style:table-cell-properties fo:background-color="transparen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1" style:family="table-cell" style:parent-style-name="Excel_20_Built-in_20_Comma" style:data-style-name="N135">
      <style:table-cell-properties fo:border-bottom="0.74pt solid #000000" style:cell-protect="protected" style:print-content="tru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62" style:family="table-cell" style:parent-style-name="Excel_20_Built-in_20_Comma" style:data-style-name="N135">
      <style:table-cell-properties fo:border-bottom="0.74pt solid #000000" style:cell-protect="protected" style:print-content="tru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3" style:family="table-cell" style:parent-style-name="Excel_20_Built-in_20_Percent" style:data-style-name="N1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64" style:family="table-cell" style:parent-style-name="Default" style:data-style-name="N1">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65" style:family="table-cell" style:parent-style-name="Default">
      <style:table-cell-properties fo:border-bottom="1.76pt solid #000000" fo:background-color="#ffff00"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6" style:family="table-cell" style:parent-style-name="Default" style:data-style-name="N142">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7" style:family="table-cell" style:parent-style-name="Default" style:data-style-name="N148">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69" style:family="table-cell" style:parent-style-name="Default" style:data-style-name="N142">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70"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71"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72" style:family="table-cell" style:parent-style-name="Default">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73"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74"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75"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76"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77"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78" style:family="table-cell" style:parent-style-name="Default">
      <style:table-cell-properties fo:background-color="#0070c0"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579"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8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81"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8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3"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6"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7"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9"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90" style:family="table-cell" style:parent-style-name="Default">
      <style:table-cell-properties fo:background-color="#0070c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59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92" style:family="table-cell" style:parent-style-name="Default">
      <style:table-cell-properties fo:background-color="#0070c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593"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9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59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96"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97" style:family="table-cell" style:parent-style-name="Default">
      <style:table-cell-properties fo:background-color="#0070c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598"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9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00" style:family="table-cell" style:parent-style-name="Default" style:data-style-name="N2">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1"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3" style:family="table-cell" style:parent-style-name="Excel_20_Built-in_20_Comma" style:data-style-name="N2">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4" style:family="table-cell" style:parent-style-name="Excel_20_Built-in_20_Comma" style:data-style-name="N2">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5" style:family="table-cell" style:parent-style-name="Excel_20_Built-in_20_Comma" style:data-style-name="N2">
      <style:table-cell-properties fo:background-color="#0070c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606"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07" style:family="table-cell" style:parent-style-name="Default" style:data-style-name="N133">
      <style:table-cell-properties fo:background-color="#0070c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light1" loext:color-type="theme"/>
      </style:text-properties>
    </style:style>
    <style:style style:name="ce608"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09"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style>
    <style:style style:name="ce610"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11" style:family="table-cell" style:parent-style-name="Default" style:data-style-name="N1">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12"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3" style:family="table-cell" style:parent-style-name="Excel_20_Built-in_20_Comma" style:data-style-name="N135">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4" style:family="table-cell" style:parent-style-name="Excel_20_Built-in_20_Comma" style:data-style-name="N135">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5" style:family="table-cell" style:parent-style-name="Excel_20_Built-in_20_Comma" style:data-style-name="N135">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6" style:family="table-cell" style:parent-style-name="Excel_20_Built-in_20_Comma" style:data-style-name="N13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7" style:family="table-cell" style:parent-style-name="Default" style:data-style-name="N13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618" style:family="table-cell" style:parent-style-name="Excel_20_Built-in_20_Comma" style:data-style-name="N135">
      <style:table-cell-properties fo:border-bottom="none" style:cell-protect="protected" style:print-content="tru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19" style:family="table-cell" style:parent-style-name="Default" style:data-style-name="N4">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20"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21" style:family="table-cell" style:parent-style-name="Default" style:data-style-name="N135">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22" style:family="table-cell" style:parent-style-name="Default" style:data-style-name="N135">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23"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24" style:family="table-cell" style:parent-style-name="Default" style:data-style-name="N135">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25" style:family="table-cell" style:parent-style-name="Default" style:data-style-name="N135">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2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27" style:family="table-cell" style:parent-style-name="Excel_20_Built-in_20_Comma" style:data-style-name="N13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28" style:family="table-cell" style:parent-style-name="Default" style:data-style-name="N135">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29" style:family="table-cell" style:parent-style-name="Excel_20_Built-in_20_Comma" style:data-style-name="N13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fo:color="#984807"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accent6" loext:color-type="theme">
          <loext:transformation loext:type="lummod" loext:value="5000"/>
        </loext:char-complex-color>
      </style:text-properties>
    </style:style>
    <style:style style:name="ce630" style:family="table-cell" style:parent-style-name="Default" style:data-style-name="N135">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984807"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accent6" loext:color-type="theme">
          <loext:transformation loext:type="lummod" loext:value="5000"/>
        </loext:char-complex-color>
      </style:text-properties>
    </style:style>
    <style:style style:name="ce631"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632" style:family="table-cell" style:parent-style-name="Excel_20_Built-in_20_Comma" style:data-style-name="N2">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33" style:family="table-cell" style:parent-style-name="Default" style:data-style-name="N13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634"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5" style:family="table-cell" style:parent-style-name="Default">
      <style:table-cell-properties fo:border-bottom="0.74pt solid #000000" fo:background-color="#0070c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light1" loext:color-type="theme"/>
      </style:text-properties>
    </style:style>
    <style:style style:name="ce63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3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8" style:family="table-cell" style:parent-style-name="Excel_20_Built-in_20_Comma" style:data-style-name="N4">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39" style:family="table-cell" style:parent-style-name="Excel_20_Built-in_20_Comma" style:data-style-name="N4">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40" style:family="table-cell" style:parent-style-name="Excel_20_Built-in_20_Comma" style:data-style-name="N4">
      <style:table-cell-properties fo:background-color="#0070c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light1" loext:color-type="theme"/>
      </style:text-properties>
    </style:style>
    <style:style style:name="ce641" style:family="table-cell" style:parent-style-name="Default" style:data-style-name="N14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642" style:family="table-cell" style:parent-style-name="Default">
      <style:table-cell-properties fo:border-bottom="0.74pt solid #000000" fo:background-color="#0070c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light1" loext:color-type="theme"/>
      </style:text-properties>
    </style:style>
    <style:style style:name="ce643" style:family="table-cell" style:parent-style-name="Default">
      <style:table-cell-properties fo:border-bottom="0.74pt solid #000000" fo:background-color="#0070c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light1" loext:color-type="theme"/>
      </style:text-properties>
    </style:style>
    <style:style style:name="ce64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5"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582cm" style:writing-mode="page"/>
    </style:style>
    <style:style style:name="ce647" style:family="table-cell" style:parent-style-name="Default">
      <style:table-cell-properties fo:background-color="#0070c0" style:diagonal-bl-tr="none" style:diagonal-tl-br="none" fo:border="0.74pt solid #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64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6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650" style:family="table-cell" style:parent-style-name="Excel_20_Built-in_20_Comma" style:data-style-name="N135">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1" style:family="table-cell" style:parent-style-name="Excel_20_Built-in_20_Comma" style:data-style-name="N135">
      <style:table-cell-properties fo:background-color="#0070c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652" style:family="table-cell" style:parent-style-name="Default">
      <style:table-cell-properties fo:border-bottom="0.74pt solid #000000" fo:background-color="#0070c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653" style:family="table-cell" style:parent-style-name="Default">
      <style:table-cell-properties fo:border-bottom="0.74pt solid #000000" fo:background-color="#0070c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654" style:family="table-cell" style:parent-style-name="Default" style:data-style-name="N133">
      <style:table-cell-properties style:diagonal-bl-tr="none" style:diagonal-tl-br="none" fo:border="none" style:rotation-align="none"/>
    </style:style>
    <style:style style:name="ce655" style:family="table-cell" style:parent-style-name="Default">
      <style:table-cell-properties fo:background-color="#0070c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656"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7"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658" style:family="table-cell" style:parent-style-name="Default">
      <style:table-cell-properties fo:background-color="#fcd5b5" style:diagonal-bl-tr="none" style:diagonal-tl-br="none" fo:border="none" style:rotation-align="none">
        <loext:background-complex-color loext:theme-type="accent6" loext:color-type="theme">
          <loext:transformation loext:type="lummod" loext:value="4000"/>
          <loext:transformation loext:type="lumoff" loext:value="5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9" style:family="table-cell" style:parent-style-name="Default">
      <style:table-cell-properties fo:border-bottom="0.74pt solid #000000" fo:background-color="#0070c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660" style:family="table-cell" style:parent-style-name="Excel_20_Built-in_20_Comma" style:data-style-name="N135">
      <style:table-cell-properties fo:border-bottom="none" style:cell-protect="protected" style:print-content="tru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1" style:family="table-cell" style:parent-style-name="Default" style:data-style-name="N133">
      <style:table-cell-properties fo:background-color="#fcd5b5" style:diagonal-bl-tr="none" style:diagonal-tl-br="none" fo:border="none" style:rotation-align="none">
        <loext:background-complex-color loext:theme-type="accent6" loext:color-type="theme">
          <loext:transformation loext:type="lummod" loext:value="4000"/>
          <loext:transformation loext:type="lumoff" loext:value="5999"/>
        </loext:background-complex-color>
      </style:table-cell-properties>
    </style:style>
    <style:style style:name="ce662" style:family="table-cell" style:parent-style-name="Default" style:data-style-name="N135">
      <style:table-cell-properties style:diagonal-bl-tr="none" style:diagonal-tl-br="none" fo:border="none" style:rotation-align="none"/>
    </style:style>
    <style:style style:name="ce663" style:family="table-cell" style:parent-style-name="Default" style:data-style-name="N1">
      <style:table-cell-properties style:diagonal-bl-tr="none" style:diagonal-tl-br="none" fo:border="none" style:rotation-align="none"/>
    </style:style>
    <style:style style:name="ce66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65" style:family="table-cell" style:parent-style-name="Default">
      <style:table-cell-properties fo:border-bottom="0.74pt solid #000000" fo:background-color="#00b0f0" style:diagonal-bl-tr="none" style:diagonal-tl-br="none" style:text-align-source="value-type"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loext:char-complex-color loext:theme-type="dark1" loext:color-type="theme"/>
      </style:text-properties>
    </style:style>
    <style:style style:name="ce666" style:family="table-cell" style:parent-style-name="Default">
      <style:table-cell-properties fo:border-bottom="0.74pt solid #000000" fo:background-color="#00b0f0" style:diagonal-bl-tr="none" style:diagonal-tl-br="none" fo:border-left="1.76pt solid #000000" fo:border-right="0.74pt solid #000000" style:rotation-align="none" fo:border-top="0.74pt solid #000000"/>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667" style:family="table-cell" style:parent-style-name="Default">
      <style:table-cell-properties fo:border-bottom="0.74pt solid #000000" style:diagonal-bl-tr="none" style:diagonal-tl-br="none" fo:border-left="1.76pt solid #000000"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8" style:family="table-cell" style:parent-style-name="Default">
      <style:table-cell-properties fo:border-bottom="none" style:diagonal-bl-tr="none" style:diagonal-tl-br="none" fo:border-left="1.76pt solid #000000"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9" style:family="table-cell" style:parent-style-name="Default">
      <style:table-cell-properties fo:border-bottom="1.76pt solid #000000" style:diagonal-bl-tr="none" style:diagonal-tl-br="none" fo:border-left="1.76pt solid #000000" fo:border-right="0.74pt solid #000000" style:rotation-align="none" fo:border-top="1.76pt solid #000000"/>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670" style:family="table-cell" style:parent-style-name="Excel_20_Built-in_20_Comma" style:data-style-name="N135">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1" style:family="table-cell" style:parent-style-name="Excel_20_Built-in_20_Comma" style:data-style-name="N14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2" style:family="table-cell" style:parent-style-name="Default" style:data-style-name="N135">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3" style:family="table-cell" style:parent-style-name="Default">
      <style:table-cell-properties fo:border-bottom="0.74pt solid #000000" fo:background-color="#00b0f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loext:char-complex-color loext:theme-type="dark1" loext:color-type="theme"/>
      </style:text-properties>
    </style:style>
    <style:style style:name="ce674"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675"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6" style:family="table-cell" style:parent-style-name="Default" style:data-style-name="N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7"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678" style:family="table-cell" style:parent-style-name="Default" style:data-style-name="N136">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9" style:family="table-cell" style:parent-style-name="Default" style:data-style-name="N133">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1"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2"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683" style:family="table-cell" style:parent-style-name="Default">
      <style:table-cell-properties fo:border-bottom="0.74pt solid #000000" fo:background-color="#00b0f0"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loext:char-complex-color loext:theme-type="dark1" loext:color-type="theme"/>
      </style:text-properties>
    </style:style>
    <style:style style:name="ce684" style:family="table-cell" style:parent-style-name="Default">
      <style:table-cell-properties fo:border-bottom="0.74pt solid #000000" fo:background-color="#00b0f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68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6" style:family="table-cell" style:parent-style-name="Default">
      <style:table-cell-properties fo:border-bottom="non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7"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688" style:family="table-cell" style:parent-style-name="Default" style:data-style-name="N4">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9" style:family="table-cell" style:parent-style-name="Default">
      <style:table-cell-properties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light1" loext:color-type="theme"/>
      </style:text-properties>
    </style:style>
    <style:style style:name="ce690" style:family="table-cell" style:parent-style-name="Default" style:data-style-name="N133">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1" style:family="table-cell" style:parent-style-name="Default">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93"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94"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291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5"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6" style:family="table-cell" style:parent-style-name="Default">
      <style:table-cell-properties fo:background-color="#ffffff" style:diagonal-bl-tr="none" style:diagonal-tl-br="none" fo:border="none" style:rotation-align="none">
        <loext:background-complex-color loext:theme-type="light1" loext:color-type="theme"/>
      </style:table-cell-properties>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97" style:family="table-cell" style:parent-style-name="Default">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98"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9"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0" style:family="table-cell" style:parent-style-name="Excel_20_Built-in_20_Comma" style:data-style-name="N135">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1" style:family="table-cell" style:parent-style-name="Excel_20_Built-in_20_Comma" style:data-style-name="N135">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2" style:family="table-cell" style:parent-style-name="Excel_20_Built-in_20_Comma" style:data-style-name="N135">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3" style:family="table-cell" style:parent-style-name="Default">
      <style:table-cell-properties fo:border-bottom="0.74pt solid #000000" fo:background-color="#0070c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loext:char-complex-color loext:theme-type="light1" loext:color-type="theme"/>
      </style:text-properties>
    </style:style>
    <style:style style:name="ce704" style:family="table-cell" style:parent-style-name="Default" style:data-style-name="N133">
      <style:table-cell-properties style:diagonal-bl-tr="none" style:diagonal-tl-br="none" fo:border="none"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5" style:family="table-cell" style:parent-style-name="Default">
      <style:table-cell-properties fo:border-bottom="0.74pt solid #000000" fo:background-color="#0070c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loext:char-complex-color loext:theme-type="light1" loext:color-type="theme"/>
      </style:text-properties>
    </style:style>
    <style:style style:name="ce70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7"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8" style:family="table-cell" style:parent-style-name="Default" style:data-style-name="N136">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9" style:family="table-cell" style:parent-style-name="Default" style:data-style-name="N133">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0" style:family="table-cell" style:parent-style-name="Default">
      <style:table-cell-properties fo:background-color="#ffffff" style:diagonal-bl-tr="none" style:diagonal-tl-br="none" fo:border="0.74pt solid #000000" style:rotation-align="none">
        <loext:background-complex-color loext:theme-type="light1" loext:color-type="theme"/>
      </style:table-cell-properties>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1" style:family="table-cell" style:parent-style-name="Default">
      <style:table-cell-properties fo:background-color="#ffffff" style:diagonal-bl-tr="none" style:diagonal-tl-br="none" fo:border="0.74pt solid #000000" style:rotation-align="none">
        <loext:background-complex-color loext:theme-type="light1" loext:color-type="theme"/>
      </style:table-cell-properties>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2" style:family="table-cell" style:parent-style-name="Default" style:data-style-name="N150">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3" style:family="table-cell" style:parent-style-name="Excel_20_Built-in_20_Comma" style:data-style-name="N135">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4" style:family="table-cell" style:parent-style-name="Excel_20_Built-in_20_Comma" style:data-style-name="N135">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5" style:family="table-cell" style:parent-style-name="Excel_20_Built-in_20_Comma" style:data-style-name="N149">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1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8"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9" style:family="table-cell" style:parent-style-name="Excel_20_Built-in_20_Comma" style:data-style-name="N13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0" style:family="table-cell" style:parent-style-name="Default" style:data-style-name="N2">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1"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22" style:family="table-cell" style:parent-style-name="Default">
      <style:table-cell-properties fo:background-color="#0070c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light1" loext:color-type="theme"/>
      </style:text-properties>
    </style:style>
    <style:style style:name="ce723" style:family="table-cell" style:parent-style-name="Default">
      <style:table-cell-properties fo:background-color="#ffffff" style:diagonal-bl-tr="none" style:diagonal-tl-br="none" fo:border="0.74pt solid #000000" style:rotation-align="none">
        <loext:background-complex-color loext:theme-type="light1"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4" style:family="table-cell" style:parent-style-name="Default">
      <style:table-cell-properties fo:background-color="#dbeef4" style:diagonal-bl-tr="none" style:diagonal-tl-br="none" fo:border="0.74pt solid #000000" style:rotation-align="none">
        <loext:background-complex-color loext:theme-type="accent5" loext:color-type="theme">
          <loext:transformation loext:type="lummod" loext:value="2000"/>
          <loext:transformation loext:type="lumoff" loext:value="7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25" style:family="table-cell" style:parent-style-name="Default">
      <style:table-cell-properties fo:border-bottom="0.74pt solid #000000" fo:background-color="#0070c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light1" loext:color-type="theme"/>
      </style:text-properties>
    </style:style>
    <style:style style:name="ce726"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7"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72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30" style:family="table-cell" style:parent-style-name="Default">
      <style:table-cell-properties fo:background-color="#0070c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light1" loext:color-type="theme"/>
      </style:text-properties>
    </style:style>
    <style:style style:name="ce731" style:family="table-cell" style:parent-style-name="Excel_20_Built-in_20_Comma" style:data-style-name="N135">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2" style:family="table-cell" style:parent-style-name="Excel_20_Built-in_20_Comma" style:data-style-name="N135">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3" style:family="table-cell" style:parent-style-name="Excel_20_Built-in_20_Comma" style:data-style-name="N135">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4" style:family="table-cell" style:parent-style-name="Excel_20_Built-in_20_Comma" style:data-style-name="N135">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5" style:family="table-cell" style:parent-style-name="Excel_20_Built-in_20_Comma" style:data-style-name="N135">
      <style:table-cell-properties fo:background-color="#dbeef4"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accent5"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8"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739"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0" style:family="table-cell" style:parent-style-name="Default" style:data-style-name="N139">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1"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2" style:family="table-cell" style:parent-style-name="Default" style:data-style-name="N1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3" style:family="table-cell" style:parent-style-name="Default" style:data-style-name="N1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44" style:family="table-cell" style:parent-style-name="Default" style:data-style-name="N1">
      <style:table-cell-properties fo:background-color="#0070c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745" style:family="table-cell" style:parent-style-name="Default" style:data-style-name="N1">
      <style:table-cell-properties fo:background-color="#0070c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746"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7" style:family="table-cell" style:parent-style-name="Default" style:data-style-name="N14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8" style:family="table-cell" style:parent-style-name="Default" style:data-style-name="N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9" style:family="table-cell" style:parent-style-name="Default" style:data-style-name="N14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50" style:family="table-cell" style:parent-style-name="Default" style:data-style-name="N138">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51" style:family="table-cell" style:parent-style-name="Default" style:data-style-name="N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style>
    <style:style style:name="ce752" style:family="table-cell" style:parent-style-name="Default" style:data-style-name="N14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style>
    <style:style style:name="ce753" style:family="table-cell" style:parent-style-name="Excel_20_Built-in_20_Comma" style:data-style-name="N135">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4" style:family="table-cell" style:parent-style-name="Excel_20_Built-in_20_Comma" style:data-style-name="N135">
      <style:table-cell-properties fo:background-color="#dbeef4"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accent5" loext:color-type="theme">
          <loext:transformation loext:type="lummod" loext:value="2000"/>
          <loext:transformation loext:type="lumoff" loext:value="7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55" style:family="table-cell" style:parent-style-name="Default" style:data-style-name="N137">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6" style:family="table-cell" style:parent-style-name="Default" style:data-style-name="N145">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7" style:family="table-cell" style:parent-style-name="Default" style:data-style-name="N139">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8" style:family="table-cell" style:parent-style-name="Default" style:data-style-name="N1">
      <style:table-cell-properties fo:border-bottom="0.74pt solid #000000" fo:background-color="#0070c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759" style:family="table-cell" style:parent-style-name="Excel_20_Built-in_20_Comma" style:data-style-name="N146">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0" style:family="table-cell" style:parent-style-name="Default" style:data-style-name="N1">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1" style:family="table-cell" style:parent-style-name="Default" style:data-style-name="N117">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2"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3" style:family="table-cell" style:parent-style-name="Default" style:data-style-name="N10">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4" style:family="table-cell" style:parent-style-name="Default" style:data-style-name="N133">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5" style:family="table-cell" style:parent-style-name="Default" style:data-style-name="N135">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6" style:family="table-cell" style:parent-style-name="Default" style:data-style-name="N1">
      <style:table-cell-properties fo:border-bottom="0.74pt solid #000000" fo:background-color="#0070c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76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768"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69" style:family="table-cell" style:parent-style-name="Default">
      <style:table-cell-properties fo:border-bottom="0.74pt solid #000000"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0" style:family="table-cell" style:parent-style-name="Default">
      <style:table-cell-properties fo:border-bottom="0.74pt solid #000000"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71"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2"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73" style:family="table-cell" style:parent-style-name="Default" style:data-style-name="N135">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74" style:family="table-cell" style:parent-style-name="Default" style:data-style-name="N135">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75" style:family="table-cell" style:parent-style-name="Excel_20_Built-in_20_Comma" style:data-style-name="N135">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6" style:family="table-cell" style:parent-style-name="Excel_20_Built-in_20_Comma" style:data-style-name="N140">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77" style:family="table-cell" style:parent-style-name="Excel_20_Built-in_20_Comma" style:data-style-name="N135">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78" style:family="table-cell" style:parent-style-name="Normal_20_4">
      <style:table-cell-properties fo:border-bottom="1.76pt solid #000000" style:diagonal-bl-tr="none" style:diagonal-tl-br="none" fo:border-left="1.76pt solid #000000" fo:border-right="0.74pt solid #000000" style:rotation-align="none" fo:border-top="1.76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9" style:family="table-cell" style:parent-style-name="Normal_20_4">
      <style:table-cell-properties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0" style:family="table-cell" style:parent-style-name="Normal_20_4">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1" style:family="table-cell" style:parent-style-name="Normal_20_4">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2" style:family="table-cell" style:parent-style-name="Normal_20_4">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3" style:family="table-cell" style:parent-style-name="Normal_20_4">
      <style:table-cell-properties fo:background-color="transparen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4" style:family="table-cell" style:parent-style-name="Normal_20_4">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5" style:family="table-cell" style:parent-style-name="Normal_20_4">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6" style:family="table-cell" style:parent-style-name="Normal_20_4">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7" style:family="table-cell" style:parent-style-name="Normal_20_4" style:data-style-name="N11">
      <style:table-cell-properties fo:border-bottom="1.76pt solid #000000" style:diagonal-bl-tr="none" style:diagonal-tl-br="none" fo:border-left="0.74pt solid #000000" fo:border-right="1.76pt solid #000000" style:rotation-align="none" fo:border-top="1.76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8" style:family="table-cell" style:parent-style-name="Normal_20_4">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9" style:family="table-cell" style:parent-style-name="Millares_20_2" style:data-style-name="N135">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0" style:family="table-cell" style:parent-style-name="Normal_20_4">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1" style:family="table-cell" style:parent-style-name="Millares_20_2" style:data-style-name="N13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2" style:family="table-cell" style:parent-style-name="Millares_20_2" style:data-style-name="N135">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3" style:family="table-cell" style:parent-style-name="Normal_20_4">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4" style:family="table-cell" style:parent-style-name="Millares_20_2" style:data-style-name="N135">
      <style:table-cell-properties fo:background-color="#93cddd"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accent5" loext:color-type="theme">
          <loext:transformation loext:type="lummod" loext:value="6000"/>
          <loext:transformation loext:type="lumoff" loext:value="3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5" style:family="table-cell" style:parent-style-name="Normal_20_4" style:data-style-name="N11">
      <style:table-cell-properties fo:background-color="#93cddd" style:diagonal-bl-tr="none" style:diagonal-tl-br="none" fo:border="0.74pt solid #000000" style:rotation-align="none">
        <loext:background-complex-color loext:theme-type="accent5" loext:color-type="theme">
          <loext:transformation loext:type="lummod" loext:value="6000"/>
          <loext:transformation loext:type="lumoff" loext:value="3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6" style:family="table-cell" style:parent-style-name="Normal_20_4" style:data-style-name="N10">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97" style:family="table-cell" style:parent-style-name="Normal_20_4" style:data-style-name="N10">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8" style:family="table-cell" style:parent-style-name="Normal_20_4" style:data-style-name="N10">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99" style:family="table-cell" style:parent-style-name="Normal_20_4">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0" style:family="table-cell" style:parent-style-name="Normal_20_4" style:data-style-name="N133">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1" style:family="table-cell" style:parent-style-name="Normal_20_4">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02" style:family="table-cell" style:parent-style-name="Normal_20_4">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03" style:family="table-cell" style:parent-style-name="Normal_20_4">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04" style:family="table-cell" style:parent-style-name="Normal_20_4">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05" style:family="table-cell" style:parent-style-name="Normal_20_4">
      <style:table-cell-properties fo:background-color="transparent"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6" style:family="table-cell" style:parent-style-name="Normal_20_4">
      <style:table-cell-properties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7" style:family="table-cell" style:parent-style-name="Normal_20_4">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08" style:family="table-cell" style:parent-style-name="Porcentaje_20_2" style:data-style-name="N1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9" style:family="table-cell" style:parent-style-name="Normal_20_4" style:data-style-name="N10">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0" style:family="table-cell" style:parent-style-name="Normal_20_4" style:data-style-name="N135">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11" style:family="table-cell" style:parent-style-name="Normal_20_4">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2" style:family="table-cell" style:parent-style-name="Millares_20_2" style:data-style-name="N135">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3" style:family="table-cell" style:parent-style-name="Normal_20_4" style:data-style-name="N11">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14" style:family="table-cell" style:parent-style-name="Millares_20_2" style:data-style-name="N135">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5" style:family="table-cell" style:parent-style-name="Normal_20_4" style:data-style-name="N135">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6" style:family="table-cell" style:parent-style-name="Normal_20_4">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7"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8" style:family="table-cell" style:parent-style-name="Default" style:data-style-name="N2">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9"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21" style:family="table-cell" style:parent-style-name="Default">
      <style:table-cell-properties fo:background-color="#0070c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light1" loext:color-type="theme"/>
      </style:text-properties>
    </style:style>
    <style:style style:name="ce822"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3" style:family="table-cell" style:parent-style-name="Normal_20_4">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25" style:family="table-cell" style:parent-style-name="Default" style:data-style-name="N1">
      <style:table-cell-properties fo:background-color="#0070c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826" style:family="table-cell" style:parent-style-name="Default" style:data-style-name="N1">
      <style:table-cell-properties fo:background-color="#0070c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827" style:family="table-cell" style:parent-style-name="Excel_20_Built-in_20_Comma" style:data-style-name="N135">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8" style:family="table-cell" style:parent-style-name="Default" style:data-style-name="N143">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9" style:family="table-cell" style:parent-style-name="Default" style:data-style-name="N14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30" style:family="table-cell" style:parent-style-name="Default" style:data-style-name="N138">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3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2" style:family="table-cell" style:parent-style-name="Excel_20_Built-in_20_Comma" style:data-style-name="N135">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3" style:family="table-cell" style:parent-style-name="Excel_20_Built-in_20_Comma" style:data-style-name="N146">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4"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5" style:family="table-cell" style:parent-style-name="Normal_20_4" style:data-style-name="N133">
      <style:table-cell-properties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6" style:family="table-cell" style:parent-style-name="Default">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light1" loext:color-type="theme"/>
      </style:text-properties>
    </style:style>
    <style:style style:name="ce837"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838"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9"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2" style:family="table-cell" style:parent-style-name="Default">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3"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844"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8" style:family="table-cell" style:parent-style-name="Default" style:data-style-name="N2">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849" style:family="table-cell" style:parent-style-name="Default" style:data-style-name="N1">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0" style:family="table-cell" style:parent-style-name="Default" style:data-style-name="N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1"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2"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3" style:family="table-cell" style:parent-style-name="Default" style:data-style-name="N1">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854" style:family="table-cell" style:parent-style-name="Default">
      <style:table-cell-properties fo:background-color="#948a54" style:diagonal-bl-tr="none" style:diagonal-tl-br="none" fo:border="0.74pt solid #000000" style:rotation-align="none">
        <loext:background-complex-color loext:theme-type="light2" loext:color-type="theme">
          <loext:transformation loext:type="lummod" loext:value="5000"/>
        </loext:background-complex-color>
      </style:table-cell-properties>
    </style:style>
    <style:style style:name="ce855" style:family="table-cell" style:parent-style-name="Default" style:data-style-name="N4">
      <style:table-cell-properties fo:background-color="#948a54" style:diagonal-bl-tr="none" style:diagonal-tl-br="none" fo:border="0.74pt solid #000000" style:rotation-align="none">
        <loext:background-complex-color loext:theme-type="light2" loext:color-type="theme">
          <loext:transformation loext:type="lummod" loext:value="5000"/>
        </loext:background-complex-color>
      </style:table-cell-properties>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loext:decorative="false"/>
      <style:paragraph-properties fo:text-align="start"/>
      <style:text-properties fo:font-size="18pt"/>
    </style:style>
    <style:style style:name="gr2"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start"/>
      <style:text-properties fo:font-size="18pt"/>
    </style:style>
    <style:style style:name="ta_extref" style:family="table">
      <style:table-properties table:display="fals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BLACION" table:style-name="ta1" table:print-ranges="POBLACION.A1:POBLACION.H66">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1" table:number-columns-repeated="4" table:default-cell-style-name="ce2"/>
        <table:table-column table:style-name="co6" table:default-cell-style-name="ce2"/>
        <table:table-column table:style-name="co1"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 table:number-columns-repeated="16368" table:default-cell-style-name="ce2"/>
        <table:table-row table:style-name="ro1" table:number-rows-repeated="5">
          <table:table-cell table:number-columns-repeated="16384"/>
        </table:table-row>
        <table:table-row table:style-name="ro1">
          <table:table-cell table:number-columns-repeated="2"/>
          <table:table-cell table:style-name="ce17" table:formula="of:=+[.G18]" office:value-type="percentage" office:value="0.000172900740005089" calcext:value-type="percentage">
            <text:p>0.02 %</text:p>
          </table:table-cell>
          <table:table-cell table:number-columns-repeated="16381"/>
        </table:table-row>
        <table:table-row table:style-name="ro2">
          <table:table-cell table:style-name="ce3" table:number-columns-repeated="6"/>
          <table:table-cell table:style-name="ce3" table:formula="of:=+[.F9]-[.E9]" office:value-type="float" office:value="10" calcext:value-type="float">
            <text:p>10</text:p>
          </table:table-cell>
          <table:table-cell table:style-name="ce3" table:number-columns-repeated="2"/>
          <table:table-cell table:number-columns-repeated="16375"/>
        </table:table-row>
        <table:table-row table:style-name="ro2">
          <table:table-cell table:style-name="ce3" table:number-columns-repeated="6"/>
          <table:table-cell table:style-name="ce3" table:formula="of:=+[.F17]-[.E17]" office:value-type="float" office:value="10" calcext:value-type="float">
            <text:p>10</text:p>
          </table:table-cell>
          <table:table-cell table:style-name="ce3" table:number-columns-repeated="2"/>
          <table:table-cell table:number-columns-repeated="2"/>
          <table:table-cell table:style-name="ce41" table:number-columns-spanned="1" table:number-rows-spanned="2"/>
          <table:table-cell table:style-name="ce41" table:number-columns-repeated="2"/>
          <table:table-cell table:style-name="ce46" table:number-columns-repeated="2"/>
          <table:table-cell table:number-columns-repeated="16368"/>
        </table:table-row>
        <table:table-row table:style-name="ro2">
          <table:table-cell table:style-name="ce3"/>
          <table:table-cell table:style-name="ce4" office:value-type="string" calcext:value-type="string">
            <text:p>Departamento</text:p>
          </table:table-cell>
          <table:table-cell table:style-name="ce4" office:value-type="string" calcext:value-type="string">
            <text:p>Indicador</text:p>
          </table:table-cell>
          <table:table-cell table:style-name="ce4" office:value-type="string" calcext:value-type="string">
            <text:p>Unidad</text:p>
          </table:table-cell>
          <table:table-cell table:style-name="ce4" office:value-type="float" office:value="2007" calcext:value-type="float">
            <text:p>2007</text:p>
          </table:table-cell>
          <table:table-cell table:style-name="ce4" office:value-type="float" office:value="2017" calcext:value-type="float">
            <text:p>2017</text:p>
          </table:table-cell>
          <table:table-cell table:style-name="ce4" office:value-type="string" calcext:value-type="string">
            <text:p>Tasa (%)</text:p>
          </table:table-cell>
          <table:table-cell table:style-name="ce3" table:number-columns-repeated="2"/>
          <table:table-cell table:number-columns-repeated="2"/>
          <table:covered-table-cell table:style-name="ce41"/>
          <table:table-cell table:style-name="ce41" table:number-columns-repeated="2"/>
          <table:table-cell table:style-name="ce46" table:number-columns-repeated="2"/>
          <table:table-cell table:number-columns-repeated="16368"/>
        </table:table-row>
        <table:table-row table:style-name="ro3">
          <table:table-cell table:style-name="ce3"/>
          <table:table-cell table:style-name="ce5" office:value-type="string" calcext:value-type="string">
            <text:p>Ayacucho</text:p>
          </table:table-cell>
          <table:table-cell table:style-name="ce18" office:value-type="string" calcext:value-type="string">
            <text:p>Población censada</text:p>
          </table:table-cell>
          <table:table-cell table:style-name="ce18" office:value-type="string" calcext:value-type="string">
            <text:p>Personas</text:p>
          </table:table-cell>
          <table:table-cell table:style-name="ce31" table:formula="of:=+[.E12]+[.E11]" office:value-type="float" office:value="612489" calcext:value-type="float">
            <text:p>612,489</text:p>
          </table:table-cell>
          <table:table-cell table:style-name="ce31" table:formula="of:=+[.F12]+[.F11]" office:value-type="float" office:value="616176" calcext:value-type="float">
            <text:p>616,176</text:p>
          </table:table-cell>
          <table:table-cell table:style-name="ce32" table:formula="of:=((([.F10]/[.E10])^(1/[.G7]))-1)" office:value-type="percentage" office:value="0.000600345528959156" calcext:value-type="percentage">
            <text:p>0.06 %</text:p>
          </table:table-cell>
          <table:table-cell table:style-name="ce33"/>
          <table:table-cell table:style-name="ce3"/>
          <table:table-cell table:number-columns-repeated="2"/>
          <table:table-cell table:style-name="ce42" table:number-columns-repeated="3"/>
          <table:table-cell table:style-name="ce47" table:number-columns-repeated="2"/>
          <table:table-cell table:number-columns-repeated="16368"/>
        </table:table-row>
        <table:table-row table:style-name="ro4">
          <table:table-cell table:style-name="ce3"/>
          <table:table-cell table:style-name="ce5" office:value-type="string" calcext:value-type="string">
            <text:p>Ayacucho</text:p>
          </table:table-cell>
          <table:table-cell table:style-name="ce18" office:value-type="string" calcext:value-type="string">
            <text:p>Población censada femenina</text:p>
          </table:table-cell>
          <table:table-cell table:style-name="ce18" office:value-type="string" calcext:value-type="string">
            <text:p>Personas</text:p>
          </table:table-cell>
          <table:table-cell table:style-name="ce31" office:value-type="float" office:value="308347" calcext:value-type="float">
            <text:p>308,347</text:p>
          </table:table-cell>
          <table:table-cell table:style-name="ce31" office:value-type="float" office:value="311836" calcext:value-type="float">
            <text:p>311,836</text:p>
          </table:table-cell>
          <table:table-cell table:style-name="ce32" table:formula="of:=((([.F11]/[.E11])^(1/[.G7]))-1)" office:value-type="percentage" office:value="0.00112579687406544" calcext:value-type="percentage">
            <text:p>0.11 %</text:p>
          </table:table-cell>
          <table:table-cell table:style-name="ce3" table:number-columns-repeated="2"/>
          <table:table-cell table:number-columns-repeated="2"/>
          <table:table-cell table:style-name="ce42" table:number-columns-repeated="3"/>
          <table:table-cell table:style-name="ce47" table:number-columns-repeated="2"/>
          <table:table-cell table:number-columns-repeated="16368"/>
        </table:table-row>
        <table:table-row table:style-name="ro2">
          <table:table-cell table:style-name="ce3"/>
          <table:table-cell table:style-name="ce5" office:value-type="string" calcext:value-type="string">
            <text:p>Ayacucho</text:p>
          </table:table-cell>
          <table:table-cell table:style-name="ce18" office:value-type="string" calcext:value-type="string">
            <text:p>Población censada masculina</text:p>
          </table:table-cell>
          <table:table-cell table:style-name="ce18" office:value-type="string" calcext:value-type="string">
            <text:p>Personas</text:p>
          </table:table-cell>
          <table:table-cell table:style-name="ce31" office:value-type="float" office:value="304142" calcext:value-type="float">
            <text:p>304,142</text:p>
          </table:table-cell>
          <table:table-cell table:style-name="ce31" office:value-type="float" office:value="304340" calcext:value-type="float">
            <text:p>304,340</text:p>
          </table:table-cell>
          <table:table-cell table:style-name="ce32" table:formula="of:=((([.F12]/[.E12])^(1/[.G7]))-1)" office:value-type="percentage" office:value="0.0000650821059775542" calcext:value-type="percentage">
            <text:p>0.01 %</text:p>
          </table:table-cell>
          <table:table-cell table:style-name="ce3" table:number-columns-repeated="2"/>
          <table:table-cell table:number-columns-repeated="2"/>
          <table:table-cell table:style-name="ce43" table:number-columns-repeated="3"/>
          <table:table-cell table:style-name="ce48" table:number-columns-repeated="2"/>
          <table:table-cell table:number-columns-repeated="16368"/>
        </table:table-row>
        <table:table-row table:style-name="ro2">
          <table:table-cell table:style-name="ce3"/>
          <table:table-cell table:style-name="ce6" office:value-type="string" calcext:value-type="string">
            <text:p>Provincia</text:p>
          </table:table-cell>
          <table:table-cell table:style-name="ce6" office:value-type="string" calcext:value-type="string">
            <text:p>Indicador</text:p>
          </table:table-cell>
          <table:table-cell table:style-name="ce6" office:value-type="string" calcext:value-type="string">
            <text:p>Unidad</text:p>
          </table:table-cell>
          <table:table-cell table:style-name="ce6" office:value-type="float" office:value="2007" calcext:value-type="float">
            <text:p>2007</text:p>
          </table:table-cell>
          <table:table-cell table:style-name="ce6" office:value-type="float" office:value="2017" calcext:value-type="float">
            <text:p>2017</text:p>
          </table:table-cell>
          <table:table-cell table:style-name="ce6" office:value-type="string" calcext:value-type="string">
            <text:p>Tasa (%)</text:p>
          </table:table-cell>
          <table:table-cell table:style-name="ce3" table:number-columns-repeated="2"/>
          <table:table-cell table:number-columns-repeated="16375"/>
        </table:table-row>
        <table:table-row table:style-name="ro5">
          <table:table-cell/>
          <table:table-cell table:style-name="ce5" office:value-type="string" calcext:value-type="string">
            <text:p>Lucanas</text:p>
          </table:table-cell>
          <table:table-cell table:style-name="ce18" office:value-type="string" calcext:value-type="string">
            <text:p>Población censada</text:p>
          </table:table-cell>
          <table:table-cell table:style-name="ce18" office:value-type="string" calcext:value-type="string">
            <text:p>Personas</text:p>
          </table:table-cell>
          <table:table-cell table:style-name="ce31" table:formula="of:=+[.E15]+[.E16]" office:value-type="float" office:value="65414" calcext:value-type="float">
            <text:p>65,414</text:p>
          </table:table-cell>
          <table:table-cell table:style-name="ce31" table:formula="of:=+[.F15]+[.F16]" office:value-type="float" office:value="51328" calcext:value-type="float">
            <text:p>51,328</text:p>
          </table:table-cell>
          <table:table-cell table:style-name="ce32" table:formula="of:=((([.F14]/[.E14])^(1/[.G7]))-1)" office:value-type="percentage" office:value="-0.0239583204841023" calcext:value-type="percentage">
            <text:p>-2.40 %</text:p>
          </table:table-cell>
          <table:table-cell table:number-columns-repeated="16377"/>
        </table:table-row>
        <table:table-row table:style-name="ro6">
          <table:table-cell/>
          <table:table-cell table:style-name="ce5" office:value-type="string" calcext:value-type="string">
            <text:p>Lucanas</text:p>
          </table:table-cell>
          <table:table-cell table:style-name="ce18" office:value-type="string" calcext:value-type="string">
            <text:p>Población censada femenina</text:p>
          </table:table-cell>
          <table:table-cell table:style-name="ce18" office:value-type="string" calcext:value-type="string">
            <text:p>Personas</text:p>
          </table:table-cell>
          <table:table-cell table:style-name="ce31" office:value-type="float" office:value="31734" calcext:value-type="float">
            <text:p>31,734</text:p>
          </table:table-cell>
          <table:table-cell table:style-name="ce31" office:value-type="float" office:value="24795" calcext:value-type="float">
            <text:p>24,795</text:p>
          </table:table-cell>
          <table:table-cell table:style-name="ce32" table:formula="of:=((([.F15]/[.E15])^(1/[.G7]))-1)" office:value-type="percentage" office:value="-0.0243727330591552" calcext:value-type="percentage">
            <text:p>-2.44 %</text:p>
          </table:table-cell>
          <table:table-cell table:number-columns-repeated="16377"/>
        </table:table-row>
        <table:table-row table:style-name="ro1">
          <table:table-cell/>
          <table:table-cell table:style-name="ce5" office:value-type="string" calcext:value-type="string">
            <text:p>Lucanas</text:p>
          </table:table-cell>
          <table:table-cell table:style-name="ce18" office:value-type="string" calcext:value-type="string">
            <text:p>Población censada masculina</text:p>
          </table:table-cell>
          <table:table-cell table:style-name="ce18" office:value-type="string" calcext:value-type="string">
            <text:p>Personas</text:p>
          </table:table-cell>
          <table:table-cell table:style-name="ce31" office:value-type="float" office:value="33680" calcext:value-type="float">
            <text:p>33,680</text:p>
          </table:table-cell>
          <table:table-cell table:style-name="ce31" office:value-type="float" office:value="26533" calcext:value-type="float">
            <text:p>26,533</text:p>
          </table:table-cell>
          <table:table-cell table:style-name="ce32" table:formula="of:=((([.F16]/[.E16])^(1/[.G7]))-1)" office:value-type="percentage" office:value="-0.0235692959798589" calcext:value-type="percentage">
            <text:p>-2.36 %</text:p>
          </table:table-cell>
          <table:table-cell table:number-columns-repeated="16377"/>
        </table:table-row>
        <table:table-row table:style-name="ro7">
          <table:table-cell/>
          <table:table-cell table:style-name="ce6" office:value-type="string" calcext:value-type="string">
            <text:p>Distrito</text:p>
          </table:table-cell>
          <table:table-cell table:style-name="ce6" office:value-type="string" calcext:value-type="string">
            <text:p>Indicador</text:p>
          </table:table-cell>
          <table:table-cell table:style-name="ce6" office:value-type="string" calcext:value-type="string">
            <text:p>Unidad</text:p>
          </table:table-cell>
          <table:table-cell table:style-name="ce6" office:value-type="float" office:value="2007" calcext:value-type="float">
            <text:p>2007</text:p>
          </table:table-cell>
          <table:table-cell table:style-name="ce6" office:value-type="float" office:value="2017" calcext:value-type="float">
            <text:p>2017</text:p>
          </table:table-cell>
          <table:table-cell table:style-name="ce6" office:value-type="string" calcext:value-type="string">
            <text:p>Tasa (%)</text:p>
          </table:table-cell>
          <table:table-cell table:number-columns-repeated="2"/>
          <table:table-cell table:style-name="ce34"/>
          <table:table-cell table:style-name="ce35" office:value-type="string" calcext:value-type="string" table:number-columns-spanned="2" table:number-rows-spanned="1">
            <text:p>AYACUCHO</text:p>
          </table:table-cell>
          <table:covered-table-cell table:style-name="ce44"/>
          <table:table-cell table:style-name="ce35" office:value-type="string" calcext:value-type="string" table:number-columns-spanned="2" table:number-rows-spanned="1">
            <text:p>LUCANAS</text:p>
          </table:table-cell>
          <table:covered-table-cell table:style-name="ce44"/>
          <table:table-cell table:style-name="ce35" office:value-type="string" calcext:value-type="string" table:number-columns-spanned="2" table:number-rows-spanned="1">
            <text:p>PUQUIO</text:p>
          </table:table-cell>
          <table:covered-table-cell table:style-name="ce44"/>
          <table:table-cell table:number-columns-repeated="16368"/>
        </table:table-row>
        <table:table-row table:style-name="ro8">
          <table:table-cell/>
          <table:table-cell table:style-name="ce5" office:value-type="string" calcext:value-type="string">
            <text:p>Puquio</text:p>
          </table:table-cell>
          <table:table-cell table:style-name="ce18" office:value-type="string" calcext:value-type="string">
            <text:p>Población censada</text:p>
          </table:table-cell>
          <table:table-cell table:style-name="ce18" office:value-type="string" calcext:value-type="string">
            <text:p>Personas</text:p>
          </table:table-cell>
          <table:table-cell table:style-name="ce31" table:formula="of:=+[.E20]+[.E19]" office:value-type="float" office:value="13870" calcext:value-type="float">
            <text:p>13,870</text:p>
          </table:table-cell>
          <table:table-cell table:style-name="ce31" table:formula="of:=+[.F20]+[.F19]" office:value-type="float" office:value="13894" calcext:value-type="float">
            <text:p>13,894</text:p>
          </table:table-cell>
          <table:table-cell table:style-name="ce32" table:formula="of:=((([.F18]/[.E18])^(1/[.G8]))-1)" office:value-type="percentage" office:value="0.000172900740005089" calcext:value-type="percentage">
            <text:p>0.02 %</text:p>
          </table:table-cell>
          <table:table-cell table:number-columns-repeated="2"/>
          <table:table-cell table:style-name="ce35" office:value-type="string" calcext:value-type="string">
            <text:p>AÑO</text:p>
          </table:table-cell>
          <table:table-cell table:style-name="ce36" office:value-type="string" calcext:value-type="string">
            <text:p>Hombres</text:p>
          </table:table-cell>
          <table:table-cell table:style-name="ce36" office:value-type="string" calcext:value-type="string">
            <text:p>Mujeres</text:p>
          </table:table-cell>
          <table:table-cell table:style-name="ce36" office:value-type="string" calcext:value-type="string">
            <text:p>Hombres</text:p>
          </table:table-cell>
          <table:table-cell table:style-name="ce36" office:value-type="string" calcext:value-type="string">
            <text:p>Mujeres</text:p>
          </table:table-cell>
          <table:table-cell table:style-name="ce36" office:value-type="string" calcext:value-type="string">
            <text:p>Hombres</text:p>
          </table:table-cell>
          <table:table-cell table:style-name="ce36" office:value-type="string" calcext:value-type="string">
            <text:p>Mujeres</text:p>
          </table:table-cell>
          <table:table-cell table:number-columns-repeated="16368"/>
        </table:table-row>
        <table:table-row table:style-name="ro9">
          <table:table-cell/>
          <table:table-cell table:style-name="ce5" office:value-type="string" calcext:value-type="string">
            <text:p>Puquio</text:p>
          </table:table-cell>
          <table:table-cell table:style-name="ce18" office:value-type="string" calcext:value-type="string">
            <text:p>Población censada femenina</text:p>
          </table:table-cell>
          <table:table-cell table:style-name="ce18" office:value-type="string" calcext:value-type="string">
            <text:p>Personas</text:p>
          </table:table-cell>
          <table:table-cell table:style-name="ce31" office:value-type="float" office:value="7238" calcext:value-type="float">
            <text:p>7,238</text:p>
          </table:table-cell>
          <table:table-cell table:style-name="ce31" office:value-type="float" office:value="7084" calcext:value-type="float">
            <text:p>7,084</text:p>
          </table:table-cell>
          <table:table-cell table:style-name="ce32" table:formula="of:=((([.F19]/[.E19])^(1/[.G8]))-1)" office:value-type="percentage" office:value="-0.00214830959472079" calcext:value-type="percentage">
            <text:p>-0.21 %</text:p>
          </table:table-cell>
          <table:table-cell table:number-columns-repeated="2"/>
          <table:table-cell table:style-name="ce36" office:value-type="float" office:value="2018" calcext:value-type="float">
            <text:p>2018</text:p>
          </table:table-cell>
          <table:table-cell table:style-name="ce26" table:formula="of:=[.F12]*(1+[.G12])" office:value-type="float" office:value="304359.807088133" calcext:value-type="float">
            <text:p>304,360</text:p>
          </table:table-cell>
          <table:table-cell table:style-name="ce26" table:formula="of:=[.F11]*(1+[.G11])" office:value-type="float" office:value="312187.063994021" calcext:value-type="float">
            <text:p>312,187</text:p>
          </table:table-cell>
          <table:table-cell table:style-name="ce26" table:formula="of:=[.F16]*(1+[.G16])" office:value-type="float" office:value="25907.6358697664" calcext:value-type="float">
            <text:p>25,908</text:p>
          </table:table-cell>
          <table:table-cell table:style-name="ce26" table:formula="of:=[.F15]*(1+[.G15])" office:value-type="float" office:value="24190.6780837982" calcext:value-type="float">
            <text:p>24,191</text:p>
          </table:table-cell>
          <table:table-cell table:style-name="ce26" table:formula="of:=[.F20]*(1+[.G20])" office:value-type="float" office:value="6828.06067020455" calcext:value-type="float">
            <text:p>6,828</text:p>
          </table:table-cell>
          <table:table-cell table:style-name="ce26" table:formula="of:=[.F19]*(1+[.G19])" office:value-type="float" office:value="7068.781374831" calcext:value-type="float">
            <text:p>7,069</text:p>
          </table:table-cell>
          <table:table-cell table:number-columns-repeated="16368"/>
        </table:table-row>
        <table:table-row table:style-name="ro3">
          <table:table-cell/>
          <table:table-cell table:style-name="ce5" office:value-type="string" calcext:value-type="string">
            <text:p>Puquio</text:p>
          </table:table-cell>
          <table:table-cell table:style-name="ce18" office:value-type="string" calcext:value-type="string">
            <text:p>Población censada masculina</text:p>
          </table:table-cell>
          <table:table-cell table:style-name="ce18" office:value-type="string" calcext:value-type="string">
            <text:p>Personas</text:p>
          </table:table-cell>
          <table:table-cell table:style-name="ce31" office:value-type="float" office:value="6632" calcext:value-type="float">
            <text:p>6,632</text:p>
          </table:table-cell>
          <table:table-cell table:style-name="ce31" office:value-type="float" office:value="6810" calcext:value-type="float">
            <text:p>6,810</text:p>
          </table:table-cell>
          <table:table-cell table:style-name="ce32" table:formula="of:=((([.F20]/[.E20])^(1/[.G8]))-1)" office:value-type="percentage" office:value="0.00265208079361989" calcext:value-type="percentage">
            <text:p>0.27 %</text:p>
          </table:table-cell>
          <table:table-cell table:number-columns-repeated="2"/>
          <table:table-cell table:style-name="ce36" office:value-type="float" office:value="2019" calcext:value-type="float">
            <text:p>2019</text:p>
          </table:table-cell>
          <table:table-cell table:style-name="ce39" table:formula="of:=+[.K19]*(1+[.$G$12])" office:value-type="float" office:value="304379.615465353" calcext:value-type="float">
            <text:p>304,380</text:p>
          </table:table-cell>
          <table:table-cell table:style-name="ce39" table:formula="of:=+[.L19]*(1+[.$G$11])" office:value-type="float" office:value="312538.523214789" calcext:value-type="float">
            <text:p>312,539</text:p>
          </table:table-cell>
          <table:table-cell table:style-name="ce39" table:formula="of:=+[.M19]*(1+[.$G$16])" office:value-type="float" office:value="25297.0111318135" calcext:value-type="float">
            <text:p>25,297</text:p>
          </table:table-cell>
          <table:table-cell table:style-name="ce39" table:formula="of:=+[.N19]*(1+[.$G$15])" office:value-type="float" office:value="23601.0851443419" calcext:value-type="float">
            <text:p>23,601</text:p>
          </table:table-cell>
          <table:table-cell table:style-name="ce39" table:formula="of:=+[.O19]*(1+[.$G$20])" office:value-type="float" office:value="6846.16923876567" calcext:value-type="float">
            <text:p>6,846</text:p>
          </table:table-cell>
          <table:table-cell table:style-name="ce39" table:formula="of:=+[.P19]*(1+[.$G$19])" office:value-type="float" office:value="7053.59544398047" calcext:value-type="float">
            <text:p>7,054</text:p>
          </table:table-cell>
          <table:table-cell table:number-columns-repeated="16368"/>
        </table:table-row>
        <table:table-row table:style-name="ro2">
          <table:table-cell/>
          <table:table-cell table:style-name="ce7" office:value-type="string" calcext:value-type="string">
            <text:p>Fuente: XII Poblacion, VII Vivienda 2017</text:p>
          </table:table-cell>
          <table:table-cell table:number-columns-repeated="7"/>
          <table:table-cell table:style-name="ce36" office:value-type="float" office:value="2020" calcext:value-type="float">
            <text:p>2020</text:p>
          </table:table-cell>
          <table:table-cell table:style-name="ce39" table:formula="of:=+[.K20]*(1+[.$G$12])" office:value-type="float" office:value="304399.425131745" calcext:value-type="float">
            <text:p>304,399</text:p>
          </table:table-cell>
          <table:table-cell table:style-name="ce39" table:formula="of:=+[.L20]*(1+[.$G$11])" office:value-type="float" office:value="312890.378107249" calcext:value-type="float">
            <text:p>312,890</text:p>
          </table:table-cell>
          <table:table-cell table:style-name="ce39" table:formula="of:=+[.M20]*(1+[.$G$16])" office:value-type="float" office:value="24700.778389042" calcext:value-type="float">
            <text:p>24,701</text:p>
          </table:table-cell>
          <table:table-cell table:style-name="ce39" table:formula="of:=+[.N20]*(1+[.$G$15])" office:value-type="float" office:value="23025.8621962124" calcext:value-type="float">
            <text:p>23,026</text:p>
          </table:table-cell>
          <table:table-cell table:style-name="ce39" table:formula="of:=+[.O20]*(1+[.$G$20])" office:value-type="float" office:value="6864.32583271367" calcext:value-type="float">
            <text:p>6,864</text:p>
          </table:table-cell>
          <table:table-cell table:style-name="ce39" table:formula="of:=+[.P20]*(1+[.$G$19])" office:value-type="float" office:value="7038.44213721088" calcext:value-type="float">
            <text:p>7,038</text:p>
          </table:table-cell>
          <table:table-cell table:number-columns-repeated="16368"/>
        </table:table-row>
        <table:table-row table:style-name="ro2">
          <table:table-cell/>
          <table:table-cell office:value-type="string" calcext:value-type="string">
            <text:p>Fuente: XI Poblacion, VI Vivienda 2007</text:p>
          </table:table-cell>
          <table:table-cell table:number-columns-repeated="7"/>
          <table:table-cell table:style-name="ce36" table:number-columns-repeated="2"/>
          <table:table-cell table:style-name="ce45" table:number-columns-repeated="5"/>
          <table:table-cell table:number-columns-repeated="16368"/>
        </table:table-row>
        <table:table-row table:style-name="ro2">
          <table:table-cell/>
          <table:table-cell table:style-name="ce7" office:value-type="string" calcext:value-type="string">
            <text:p>Poblacion Puquio 2020</text:p>
          </table:table-cell>
          <table:table-cell table:number-columns-repeated="7"/>
          <table:table-cell table:style-name="ce36" table:number-columns-repeated="2"/>
          <table:table-cell table:style-name="ce45" table:number-columns-repeated="5"/>
          <table:table-cell table:number-columns-repeated="16368"/>
        </table:table-row>
        <table:table-row table:style-name="ro10">
          <table:table-cell/>
          <table:table-cell table:style-name="ce8" office:value-type="string" calcext:value-type="string">
            <text:p>GÉNERO</text:p>
          </table:table-cell>
          <table:table-cell table:style-name="ce19" office:value-type="string" calcext:value-type="string">
            <text:p>Ayacucho</text:p>
          </table:table-cell>
          <table:table-cell table:style-name="ce19" office:value-type="string" calcext:value-type="string">
            <text:p>Lucanas</text:p>
          </table:table-cell>
          <table:table-cell table:style-name="ce19" office:value-type="string" calcext:value-type="string">
            <text:p>Puquio</text:p>
          </table:table-cell>
          <table:table-cell table:number-columns-repeated="4"/>
          <table:table-cell table:style-name="ce36" table:number-columns-repeated="2"/>
          <table:table-cell table:style-name="ce45" table:number-columns-repeated="5"/>
          <table:table-cell table:number-columns-repeated="16368"/>
        </table:table-row>
        <table:table-row table:style-name="ro2">
          <table:table-cell/>
          <table:table-cell table:style-name="ce9" office:value-type="string" calcext:value-type="string">
            <text:p>Hombres</text:p>
          </table:table-cell>
          <table:table-cell table:style-name="ce20" table:formula="of:=+[.K21]" office:value-type="float" office:value="304399.425131745" calcext:value-type="float">
            <text:p>304,399</text:p>
          </table:table-cell>
          <table:table-cell table:style-name="ce20" table:formula="of:=+[.M21]" office:value-type="float" office:value="24700.778389042" calcext:value-type="float">
            <text:p>24,701</text:p>
          </table:table-cell>
          <table:table-cell table:style-name="ce20" table:formula="of:=+[.O21]" office:value-type="float" office:value="6864.32583271367" calcext:value-type="float">
            <text:p>6,864</text:p>
          </table:table-cell>
          <table:table-cell table:number-columns-repeated="4"/>
          <table:table-cell table:style-name="ce37" table:number-columns-spanned="7" table:number-rows-spanned="1"/>
          <table:covered-table-cell table:number-columns-repeated="6" table:style-name="ce37"/>
          <table:table-cell table:number-columns-repeated="16368"/>
        </table:table-row>
        <table:table-row table:style-name="ro2">
          <table:table-cell/>
          <table:table-cell table:style-name="ce9" office:value-type="string" calcext:value-type="string">
            <text:p>Mujeres</text:p>
          </table:table-cell>
          <table:table-cell table:style-name="ce20" table:formula="of:=+[.L21]" office:value-type="float" office:value="312890.378107249" calcext:value-type="float">
            <text:p>312,890</text:p>
          </table:table-cell>
          <table:table-cell table:style-name="ce20" table:formula="of:=+[.N21]" office:value-type="float" office:value="23025.8621962124" calcext:value-type="float">
            <text:p>23,026</text:p>
          </table:table-cell>
          <table:table-cell table:style-name="ce20" table:formula="of:=+[.P21]" office:value-type="float" office:value="7038.44213721088" calcext:value-type="float">
            <text:p>7,038</text:p>
          </table:table-cell>
          <table:table-cell table:number-columns-repeated="4"/>
          <table:table-cell table:style-name="ce38" table:number-columns-spanned="7" table:number-rows-spanned="1"/>
          <table:covered-table-cell table:number-columns-repeated="6" table:style-name="ce40"/>
          <table:table-cell table:number-columns-repeated="16368"/>
        </table:table-row>
        <table:table-row table:style-name="ro2">
          <table:table-cell/>
          <table:table-cell table:style-name="ce10" office:value-type="string" calcext:value-type="string">
            <text:p>Total</text:p>
          </table:table-cell>
          <table:table-cell table:style-name="ce21" table:formula="of:=SUM([.C25:.C26])" office:value-type="float" office:value="617289.803238994" calcext:value-type="float">
            <text:p>617,290</text:p>
          </table:table-cell>
          <table:table-cell table:style-name="ce21" table:formula="of:=SUM([.D25:.D26])" office:value-type="float" office:value="47726.6405852544" calcext:value-type="float">
            <text:p>47,727</text:p>
          </table:table-cell>
          <table:table-cell table:style-name="ce21" table:formula="of:=SUM([.E25:.E26])" office:value-type="float" office:value="13902.7679699246" calcext:value-type="float">
            <text:p>13,903</text:p>
          </table:table-cell>
          <table:table-cell table:number-columns-repeated="4"/>
          <table:table-cell table:style-name="ce38" table:number-columns-spanned="7" table:number-rows-spanned="1"/>
          <table:covered-table-cell table:number-columns-repeated="6" table:style-name="ce40"/>
          <table:table-cell table:number-columns-repeated="16368"/>
        </table:table-row>
        <table:table-row table:style-name="ro1">
          <table:table-cell table:number-columns-repeated="9"/>
          <table:table-cell table:style-name="ce38" table:number-columns-spanned="7" table:number-rows-spanned="1"/>
          <table:covered-table-cell table:number-columns-repeated="6" table:style-name="ce40"/>
          <table:table-cell table:number-columns-repeated="16368"/>
        </table:table-row>
        <table:table-row table:style-name="ro1">
          <table:table-cell table:number-columns-repeated="9"/>
          <table:table-cell table:style-name="ce38" table:number-columns-spanned="7" table:number-rows-spanned="1"/>
          <table:covered-table-cell table:number-columns-repeated="6" table:style-name="ce40"/>
          <table:table-cell table:number-columns-repeated="16368"/>
        </table:table-row>
        <table:table-row table:style-name="ro1">
          <table:table-cell table:number-columns-repeated="9"/>
          <table:table-cell table:style-name="ce38" table:number-columns-spanned="7" table:number-rows-spanned="1"/>
          <table:covered-table-cell table:number-columns-repeated="6" table:style-name="ce40"/>
          <table:table-cell table:number-columns-repeated="16368"/>
        </table:table-row>
        <table:table-row table:style-name="ro1">
          <table:table-cell table:number-columns-repeated="9"/>
          <table:table-cell table:style-name="ce38" table:number-columns-spanned="7" table:number-rows-spanned="1"/>
          <table:covered-table-cell table:number-columns-repeated="6" table:style-name="ce40"/>
          <table:table-cell table:number-columns-repeated="16368"/>
        </table:table-row>
        <table:table-row table:style-name="ro1">
          <table:table-cell table:number-columns-repeated="9"/>
          <table:table-cell table:style-name="ce38" table:number-columns-spanned="7" table:number-rows-spanned="1"/>
          <table:covered-table-cell table:number-columns-repeated="6" table:style-name="ce40"/>
          <table:table-cell table:number-columns-repeated="16368"/>
        </table:table-row>
        <table:table-row table:style-name="ro1">
          <table:table-cell table:number-columns-repeated="9"/>
          <table:table-cell table:style-name="ce38" table:number-columns-spanned="7" table:number-rows-spanned="1"/>
          <table:covered-table-cell table:number-columns-repeated="6" table:style-name="ce40"/>
          <table:table-cell table:number-columns-repeated="16368"/>
        </table:table-row>
        <table:table-row table:style-name="ro1">
          <table:table-cell table:number-columns-repeated="9"/>
          <table:table-cell table:style-name="ce38" table:number-columns-spanned="7" table:number-rows-spanned="1"/>
          <table:covered-table-cell table:number-columns-repeated="6" table:style-name="ce40"/>
          <table:table-cell table:number-columns-repeated="16368"/>
        </table:table-row>
        <table:table-row table:style-name="ro2">
          <table:table-cell table:number-columns-repeated="3"/>
          <table:table-cell table:style-name="ce25" office:value-type="string" calcext:value-type="string">
            <text:p>AÑO</text:p>
          </table:table-cell>
          <table:table-cell table:style-name="ce25" office:value-type="string" calcext:value-type="string">
            <text:p>Puquio</text:p>
          </table:table-cell>
          <table:table-cell table:style-name="ce25" office:value-type="string" calcext:value-type="string">
            <text:p>Familias</text:p>
          </table:table-cell>
          <table:table-cell table:number-columns-repeated="16378"/>
        </table:table-row>
        <table:table-row table:style-name="ro2">
          <table:table-cell table:number-columns-repeated="3"/>
          <table:table-cell table:style-name="ce26" office:value-type="float" office:value="2020" calcext:value-type="float">
            <text:p>2,020</text:p>
          </table:table-cell>
          <table:table-cell table:style-name="ce26" table:formula="of:=+[.E27]" office:value-type="float" office:value="13902.7679699246" calcext:value-type="float">
            <text:p>13,903</text:p>
          </table:table-cell>
          <table:table-cell table:style-name="ce26" table:formula="of:=+[.E36]/4" office:value-type="float" office:value="3475.69199248114" calcext:value-type="float">
            <text:p>3,476</text:p>
          </table:table-cell>
          <table:table-cell table:number-columns-repeated="16378"/>
        </table:table-row>
        <table:table-row table:style-name="ro2">
          <table:table-cell table:number-columns-repeated="3"/>
          <table:table-cell table:style-name="ce26" office:value-type="float" office:value="2021" calcext:value-type="float">
            <text:p>2,021</text:p>
          </table:table-cell>
          <table:table-cell table:style-name="ce26" table:formula="of:=+[.E36]*(1+[.$G$18])" office:value-type="float" office:value="13905.1717687947" calcext:value-type="float">
            <text:p>13,905</text:p>
          </table:table-cell>
          <table:table-cell table:style-name="ce26" table:formula="of:=+[.E37]/4" office:value-type="float" office:value="3476.29294219867" calcext:value-type="float">
            <text:p>3,476</text:p>
          </table:table-cell>
          <table:table-cell table:number-columns-repeated="16378"/>
        </table:table-row>
        <table:table-row table:style-name="ro2">
          <table:table-cell table:number-columns-repeated="3"/>
          <table:table-cell table:style-name="ce26" office:value-type="float" office:value="2022" calcext:value-type="float">
            <text:p>2,022</text:p>
          </table:table-cell>
          <table:table-cell table:style-name="ce26" table:formula="of:=+[.E37]*(1+[.$G$18])" office:value-type="float" office:value="13907.5759832834" calcext:value-type="float">
            <text:p>13,908</text:p>
          </table:table-cell>
          <table:table-cell table:style-name="ce26" table:formula="of:=+[.E38]/4" office:value-type="float" office:value="3476.89399582085" calcext:value-type="float">
            <text:p>3,477</text:p>
          </table:table-cell>
          <table:table-cell table:number-columns-repeated="16378"/>
        </table:table-row>
        <table:table-row table:style-name="ro2">
          <table:table-cell table:number-columns-repeated="3"/>
          <table:table-cell table:style-name="ce26" office:value-type="float" office:value="2023" calcext:value-type="float">
            <text:p>2,023</text:p>
          </table:table-cell>
          <table:table-cell table:style-name="ce26" table:formula="of:=+[.E38]*(1+[.$G$18])" office:value-type="float" office:value="13909.9806134626" calcext:value-type="float">
            <text:p>13,910</text:p>
          </table:table-cell>
          <table:table-cell table:style-name="ce26" table:formula="of:=+[.E39]/4" office:value-type="float" office:value="3477.49515336565" calcext:value-type="float">
            <text:p>3,477</text:p>
          </table:table-cell>
          <table:table-cell table:number-columns-repeated="16378"/>
        </table:table-row>
        <table:table-row table:style-name="ro2">
          <table:table-cell table:number-columns-repeated="3"/>
          <table:table-cell table:style-name="ce26" office:value-type="float" office:value="2024" calcext:value-type="float">
            <text:p>2,024</text:p>
          </table:table-cell>
          <table:table-cell table:style-name="ce26" table:formula="of:=+[.E39]*(1+[.$G$18])" office:value-type="float" office:value="13912.3856594041" calcext:value-type="float">
            <text:p>13,912</text:p>
          </table:table-cell>
          <table:table-cell table:style-name="ce26" table:formula="of:=+[.E40]/4" office:value-type="float" office:value="3478.09641485103" calcext:value-type="float">
            <text:p>3,478</text:p>
          </table:table-cell>
          <table:table-cell table:number-columns-repeated="16378"/>
        </table:table-row>
        <table:table-row table:style-name="ro2">
          <table:table-cell table:number-columns-repeated="3"/>
          <table:table-cell table:style-name="ce26" office:value-type="float" office:value="2025" calcext:value-type="float">
            <text:p>2,025</text:p>
          </table:table-cell>
          <table:table-cell table:style-name="ce26" table:formula="of:=+[.E40]*(1+[.$G$18])" office:value-type="float" office:value="13914.7911211799" calcext:value-type="float">
            <text:p>13,915</text:p>
          </table:table-cell>
          <table:table-cell table:style-name="ce26" table:formula="of:=+[.E41]/4" office:value-type="float" office:value="3478.69778029496" calcext:value-type="float">
            <text:p>3,479</text:p>
          </table:table-cell>
          <table:table-cell table:number-columns-repeated="16378"/>
        </table:table-row>
        <table:table-row table:style-name="ro1" table:number-rows-repeated="2">
          <table:table-cell table:number-columns-repeated="16384"/>
        </table:table-row>
        <table:table-row table:style-name="ro11">
          <table:table-cell/>
          <table:table-cell table:style-name="ce11" office:value-type="string" calcext:value-type="string">
            <text:p>Provincia</text:p>
          </table:table-cell>
          <table:table-cell table:style-name="ce22" office:value-type="string" calcext:value-type="string">
            <text:p>Nombre Del Establecimiento (Recreo)</text:p>
          </table:table-cell>
          <table:table-cell table:style-name="ce27" office:value-type="string" calcext:value-type="string">
            <text:p>Requerimiento (Cuyes/semana)</text:p>
          </table:table-cell>
          <table:table-cell table:number-columns-repeated="16380"/>
        </table:table-row>
        <table:table-row table:style-name="ro1">
          <table:table-cell/>
          <table:table-cell table:style-name="ce12" office:value-type="string" calcext:value-type="string" table:number-columns-spanned="1" table:number-rows-spanned="14">
            <text:p>Distritos de Puquio</text:p>
          </table:table-cell>
          <table:table-cell table:style-name="ce23" office:value-type="string" calcext:value-type="string">
            <text:p>Las Flores</text:p>
          </table:table-cell>
          <table:table-cell table:style-name="ce28" office:value-type="float" office:value="754" calcext:value-type="float">
            <text:p>754</text:p>
          </table:table-cell>
          <table:table-cell table:number-columns-repeated="16380"/>
        </table:table-row>
        <table:table-row table:style-name="ro1">
          <table:table-cell/>
          <table:covered-table-cell table:style-name="ce13"/>
          <table:table-cell table:style-name="ce23" office:value-type="string" calcext:value-type="string">
            <text:p>El Kututo</text:p>
          </table:table-cell>
          <table:table-cell table:style-name="ce28" office:value-type="float" office:value="546" calcext:value-type="float">
            <text:p>546</text:p>
          </table:table-cell>
          <table:table-cell table:number-columns-repeated="16380"/>
        </table:table-row>
        <table:table-row table:style-name="ro1">
          <table:table-cell/>
          <table:covered-table-cell table:style-name="ce13"/>
          <table:table-cell table:style-name="ce23" office:value-type="string" calcext:value-type="string">
            <text:p>Los Nogales</text:p>
          </table:table-cell>
          <table:table-cell table:style-name="ce28" office:value-type="float" office:value="442" calcext:value-type="float">
            <text:p>442</text:p>
          </table:table-cell>
          <table:table-cell table:number-columns-repeated="16380"/>
        </table:table-row>
        <table:table-row table:style-name="ro1">
          <table:table-cell/>
          <table:covered-table-cell table:style-name="ce13"/>
          <table:table-cell table:style-name="ce23" office:value-type="string" calcext:value-type="string">
            <text:p>El Rey Macho Kututo.</text:p>
          </table:table-cell>
          <table:table-cell table:style-name="ce28" office:value-type="float" office:value="572" calcext:value-type="float">
            <text:p>572</text:p>
          </table:table-cell>
          <table:table-cell table:number-columns-repeated="16380"/>
        </table:table-row>
        <table:table-row table:style-name="ro1">
          <table:table-cell/>
          <table:covered-table-cell table:style-name="ce13"/>
          <table:table-cell table:style-name="ce23" office:value-type="string" calcext:value-type="string">
            <text:p>La Cruz de Mirador</text:p>
          </table:table-cell>
          <table:table-cell table:style-name="ce28" office:value-type="float" office:value="345" calcext:value-type="float">
            <text:p>345</text:p>
          </table:table-cell>
          <table:table-cell table:number-columns-repeated="16380"/>
        </table:table-row>
        <table:table-row table:style-name="ro1">
          <table:table-cell/>
          <table:covered-table-cell table:style-name="ce13"/>
          <table:table-cell table:style-name="ce23" office:value-type="string" calcext:value-type="string">
            <text:p>El Balcón</text:p>
          </table:table-cell>
          <table:table-cell table:style-name="ce28" office:value-type="float" office:value="468" calcext:value-type="float">
            <text:p>468</text:p>
          </table:table-cell>
          <table:table-cell table:number-columns-repeated="16380"/>
        </table:table-row>
        <table:table-row table:style-name="ro1">
          <table:table-cell/>
          <table:covered-table-cell table:style-name="ce13"/>
          <table:table-cell table:style-name="ce23" office:value-type="string" calcext:value-type="string">
            <text:p>Las Vegas</text:p>
          </table:table-cell>
          <table:table-cell table:style-name="ce28" office:value-type="float" office:value="384" calcext:value-type="float">
            <text:p>384</text:p>
          </table:table-cell>
          <table:table-cell table:number-columns-repeated="16380"/>
        </table:table-row>
        <table:table-row table:style-name="ro1">
          <table:table-cell/>
          <table:covered-table-cell table:style-name="ce13"/>
          <table:table-cell table:style-name="ce23" office:value-type="string" calcext:value-type="string">
            <text:p>Huamanguino</text:p>
          </table:table-cell>
          <table:table-cell table:style-name="ce28" office:value-type="float" office:value="481" calcext:value-type="float">
            <text:p>481</text:p>
          </table:table-cell>
          <table:table-cell table:number-columns-repeated="16380"/>
        </table:table-row>
        <table:table-row table:style-name="ro1">
          <table:table-cell/>
          <table:covered-table-cell table:style-name="ce13"/>
          <table:table-cell table:style-name="ce23" office:value-type="string" calcext:value-type="string">
            <text:p>Vip el Saucecito</text:p>
          </table:table-cell>
          <table:table-cell table:style-name="ce28" office:value-type="float" office:value="325" calcext:value-type="float">
            <text:p>325</text:p>
          </table:table-cell>
          <table:table-cell table:number-columns-repeated="16380"/>
        </table:table-row>
        <table:table-row table:style-name="ro1">
          <table:table-cell/>
          <table:covered-table-cell table:style-name="ce13"/>
          <table:table-cell table:style-name="ce23" office:value-type="string" calcext:value-type="string">
            <text:p>Juanito</text:p>
          </table:table-cell>
          <table:table-cell table:style-name="ce28" office:value-type="float" office:value="344" calcext:value-type="float">
            <text:p>344</text:p>
          </table:table-cell>
          <table:table-cell table:number-columns-repeated="16380"/>
        </table:table-row>
        <table:table-row table:style-name="ro1">
          <table:table-cell/>
          <table:covered-table-cell table:style-name="ce13"/>
          <table:table-cell table:style-name="ce23" office:value-type="string" calcext:value-type="string">
            <text:p>Huarango</text:p>
          </table:table-cell>
          <table:table-cell table:style-name="ce28" office:value-type="float" office:value="234" calcext:value-type="float">
            <text:p>234</text:p>
          </table:table-cell>
          <table:table-cell table:number-columns-repeated="16380"/>
        </table:table-row>
        <table:table-row table:style-name="ro1">
          <table:table-cell/>
          <table:covered-table-cell table:style-name="ce13"/>
          <table:table-cell table:style-name="ce23" office:value-type="string" calcext:value-type="string">
            <text:p>Recreos de Muyurina</text:p>
          </table:table-cell>
          <table:table-cell table:style-name="ce28" office:value-type="float" office:value="546" calcext:value-type="float">
            <text:p>546</text:p>
          </table:table-cell>
          <table:table-cell table:number-columns-repeated="16380"/>
        </table:table-row>
        <table:table-row table:style-name="ro1">
          <table:table-cell/>
          <table:covered-table-cell table:style-name="ce13"/>
          <table:table-cell table:style-name="ce23" office:value-type="string" calcext:value-type="string">
            <text:p>Establecimientos de Quinua</text:p>
          </table:table-cell>
          <table:table-cell table:style-name="ce28" office:value-type="float" office:value="344" calcext:value-type="float">
            <text:p>344</text:p>
          </table:table-cell>
          <table:table-cell table:number-columns-repeated="16380"/>
        </table:table-row>
        <table:table-row table:style-name="ro1">
          <table:table-cell/>
          <table:covered-table-cell table:style-name="ce14"/>
          <table:table-cell table:style-name="ce23" office:value-type="string" calcext:value-type="string">
            <text:p>Otros Recreos</text:p>
          </table:table-cell>
          <table:table-cell table:style-name="ce28" office:value-type="float" office:value="465" calcext:value-type="float">
            <text:p>465</text:p>
          </table:table-cell>
          <table:table-cell table:number-columns-repeated="16380"/>
        </table:table-row>
        <table:table-row table:style-name="ro1">
          <table:table-cell/>
          <table:table-cell table:style-name="ce15" office:value-type="string" calcext:value-type="string">
            <text:p>Total</text:p>
          </table:table-cell>
          <table:table-cell table:style-name="ce24" office:value-type="string" calcext:value-type="string">
            <text:p>Demanda <text:s/>(cuyes/año)</text:p>
          </table:table-cell>
          <table:table-cell table:style-name="ce29" table:formula="of:=SUM([.D45:.D58])*4*12" office:value-type="float" office:value="300000" calcext:value-type="float">
            <text:p>300,000</text:p>
          </table:table-cell>
          <table:table-cell table:number-columns-repeated="16380"/>
        </table:table-row>
        <table:table-row table:style-name="ro1">
          <table:table-cell/>
          <table:table-cell office:value-type="string" calcext:value-type="string">
            <text:p>Fuente: Elaboración propia en base a encuestas, diciembre 2016.</text:p>
          </table:table-cell>
          <table:table-cell/>
          <table:table-cell table:style-name="ce30"/>
          <table:table-cell table:number-columns-repeated="16380"/>
        </table:table-row>
        <table:table-row table:style-name="ro1" table:number-rows-repeated="2">
          <table:table-cell table:number-columns-repeated="3"/>
          <table:table-cell table:style-name="ce30"/>
          <table:table-cell table:number-columns-repeated="16380"/>
        </table:table-row>
        <table:table-row table:style-name="ro12">
          <table:table-cell/>
          <table:table-cell table:style-name="ce6" office:value-type="string" calcext:value-type="string">
            <text:p>Nombre Del Establecimiento (Recreo)</text:p>
          </table:table-cell>
          <table:table-cell table:style-name="ce6" office:value-type="string" calcext:value-type="string" table:number-columns-spanned="2" table:number-rows-spanned="1">
            <text:p><text:s/>Rango deRequerimiento <text:s/>(Cuyes/Semana)</text:p>
          </table:table-cell>
          <table:covered-table-cell table:style-name="ce6"/>
          <table:table-cell table:style-name="ce6" office:value-type="string" calcext:value-type="string">
            <text:p><text:s/>Requerimiento Promedio <text:s/>(Cuyes/Semana)</text:p>
          </table:table-cell>
          <table:table-cell table:number-columns-repeated="16379"/>
        </table:table-row>
        <table:table-row table:style-name="ro13">
          <table:table-cell/>
          <table:table-cell table:style-name="ce16" office:value-type="string" calcext:value-type="string">
            <text:p>Recreo Turístico el Huarango</text:p>
          </table:table-cell>
          <table:table-cell table:style-name="ce12" office:value-type="float" office:value="160" calcext:value-type="float">
            <text:p>160</text:p>
          </table:table-cell>
          <table:table-cell table:style-name="ce12" office:value-type="float" office:value="200" calcext:value-type="float">
            <text:p>200</text:p>
          </table:table-cell>
          <table:table-cell table:style-name="ce12" office:value-type="float" office:value="180" calcext:value-type="float">
            <text:p>180</text:p>
          </table:table-cell>
          <table:table-cell table:number-columns-repeated="16379"/>
        </table:table-row>
        <table:table-row table:style-name="ro13">
          <table:table-cell/>
          <table:table-cell table:style-name="ce16" office:value-type="string" calcext:value-type="string">
            <text:p>Demanda total (cuyes/semana)</text:p>
          </table:table-cell>
          <table:table-cell table:style-name="ce12" office:value-type="float" office:value="160" calcext:value-type="float">
            <text:p>160</text:p>
          </table:table-cell>
          <table:table-cell table:style-name="ce12" office:value-type="float" office:value="200" calcext:value-type="float">
            <text:p>200</text:p>
          </table:table-cell>
          <table:table-cell table:style-name="ce12" office:value-type="float" office:value="180" calcext:value-type="float">
            <text:p>180</text:p>
          </table:table-cell>
          <table:table-cell table:number-columns-repeated="16379"/>
        </table:table-row>
        <table:table-row table:style-name="ro13">
          <table:table-cell/>
          <table:table-cell table:style-name="ce16" office:value-type="string" calcext:value-type="string">
            <text:p>Demanda total (cuyes/año)</text:p>
          </table:table-cell>
          <table:table-cell table:style-name="ce12" office:value-type="float" office:value="7680" calcext:value-type="float">
            <text:p>7680</text:p>
          </table:table-cell>
          <table:table-cell table:style-name="ce12" office:value-type="float" office:value="9600" calcext:value-type="float">
            <text:p>9600</text:p>
          </table:table-cell>
          <table:table-cell table:style-name="ce12" office:value-type="float" office:value="8640" calcext:value-type="float">
            <text:p>8640</text:p>
          </table:table-cell>
          <table:table-cell table:number-columns-repeated="16379"/>
        </table:table-row>
        <table:table-row table:style-name="ro1" table:number-rows-repeated="1048509">
          <table:table-cell table:number-columns-repeated="16384"/>
        </table:table-row>
        <table:table-row table:style-name="ro1">
          <table:table-cell table:number-columns-repeated="16384"/>
        </table:table-row>
        <table:named-expressions>
          <table:named-range table:name="_xlnm.Print_Area" table:base-cell-address="$POBLACION.$A$1" table:cell-range-address="$POBLACION.$A$1:.$H$66" table:range-usable-as="print-range"/>
        </table:named-expressions>
      </table:table>
      <table:table table:name="DEMANDA" table:style-name="ta2">
        <table:table-column table:style-name="co12" table:default-cell-style-name="ce49"/>
        <table:table-column table:style-name="co13" table:default-cell-style-name="ce49"/>
        <table:table-column table:style-name="co14" table:default-cell-style-name="ce49"/>
        <table:table-column table:style-name="co15" table:default-cell-style-name="ce49"/>
        <table:table-column table:style-name="co16" table:default-cell-style-name="ce49"/>
        <table:table-column table:style-name="co17" table:default-cell-style-name="ce49"/>
        <table:table-column table:style-name="co13" table:default-cell-style-name="ce49"/>
        <table:table-column table:style-name="co18" table:default-cell-style-name="ce49"/>
        <table:table-column table:style-name="co19" table:default-cell-style-name="ce49"/>
        <table:table-column table:style-name="co13" table:default-cell-style-name="ce49"/>
        <table:table-column table:style-name="co5" table:default-cell-style-name="ce49"/>
        <table:table-column table:style-name="co13" table:default-cell-style-name="ce49"/>
        <table:table-column table:style-name="co10" table:default-cell-style-name="ce49"/>
        <table:table-column table:style-name="co20" table:number-columns-repeated="5" table:default-cell-style-name="ce49"/>
        <table:table-column table:style-name="co21" table:default-cell-style-name="ce49"/>
        <table:table-column table:style-name="co22" table:default-cell-style-name="ce49"/>
        <table:table-column table:style-name="co20" table:number-columns-repeated="16364" table:default-cell-style-name="ce49"/>
        <table:table-row table:style-name="ro6">
          <table:table-cell table:number-columns-repeated="16384"/>
        </table:table-row>
        <table:table-row table:style-name="ro14">
          <table:table-cell table:style-name="ce50" office:value-type="string" calcext:value-type="string" table:number-columns-spanned="5" table:number-rows-spanned="1">
            <text:p>PROYECCIÓN DE LA POBLACIÓN DEL DISTRITO DE PUQUIO</text:p>
          </table:table-cell>
          <table:covered-table-cell table:number-columns-repeated="4" table:style-name="ce50"/>
          <table:table-cell table:number-columns-repeated="16379"/>
        </table:table-row>
        <table:table-row table:style-name="ro15">
          <table:table-cell table:style-name="ce51" office:value-type="string" calcext:value-type="string" table:number-columns-spanned="2" table:number-rows-spanned="2">
            <text:p>DISTRITO</text:p>
          </table:table-cell>
          <table:covered-table-cell table:style-name="ce51"/>
          <table:table-cell table:style-name="ce78" office:value-type="string" calcext:value-type="string">
            <text:p>POBLACIÓN</text:p>
          </table:table-cell>
          <table:table-cell table:style-name="ce51" office:value-type="string" calcext:value-type="string" table:number-columns-spanned="1" table:number-rows-spanned="2">
            <text:p>MIEMBROS POR FAMILIA</text:p>
          </table:table-cell>
          <table:table-cell table:style-name="ce78" office:value-type="string" calcext:value-type="string">
            <text:p>NÚMERO DE FAMILIAS</text:p>
          </table:table-cell>
          <table:table-cell table:number-columns-repeated="16379"/>
        </table:table-row>
        <table:table-row table:style-name="ro15">
          <table:covered-table-cell table:number-columns-repeated="2" table:style-name="ce51"/>
          <table:table-cell table:style-name="ce79" office:value-type="float" office:value="2020" calcext:value-type="float">
            <text:p>2020</text:p>
          </table:table-cell>
          <table:covered-table-cell table:style-name="ce86"/>
          <table:table-cell table:style-name="ce51" office:value-type="float" office:value="2020" calcext:value-type="float">
            <text:p>2020</text:p>
          </table:table-cell>
          <table:table-cell table:number-columns-repeated="4"/>
          <table:table-cell table:style-name="ce115"/>
          <table:table-cell table:number-columns-repeated="16374"/>
        </table:table-row>
        <table:table-row table:style-name="ro15">
          <table:table-cell table:style-name="ce52" office:value-type="string" calcext:value-type="string" table:number-columns-spanned="2" table:number-rows-spanned="1">
            <text:p>PUQUIO</text:p>
          </table:table-cell>
          <table:covered-table-cell table:style-name="ce52"/>
          <table:table-cell table:style-name="ce80" table:formula="of:=+[$POBLACION.E36]" office:value-type="float" office:value="13902.7679699246" calcext:value-type="float">
            <text:p>13,903</text:p>
          </table:table-cell>
          <table:table-cell table:style-name="ce87" office:value-type="float" office:value="4" calcext:value-type="float">
            <text:p>4</text:p>
          </table:table-cell>
          <table:table-cell table:style-name="ce87" table:formula="of:=+[.C5]/[.$D$5]" office:value-type="float" office:value="3475.69199248114" calcext:value-type="float">
            <text:p>3476</text:p>
          </table:table-cell>
          <table:table-cell table:number-columns-repeated="4"/>
          <table:table-cell table:style-name="ce55"/>
          <table:table-cell table:number-columns-repeated="16374"/>
        </table:table-row>
        <table:table-row table:style-name="ro15">
          <table:table-cell table:style-name="ce53" office:value-type="string" calcext:value-type="string" table:number-columns-spanned="2" table:number-rows-spanned="1">
            <text:p>TOTAL</text:p>
          </table:table-cell>
          <table:covered-table-cell table:style-name="ce53"/>
          <table:table-cell table:style-name="ce81" table:formula="of:=SUM([.C5:.C5])" office:value-type="float" office:value="13902.7679699246" calcext:value-type="float">
            <text:p>13,903</text:p>
          </table:table-cell>
          <table:table-cell table:style-name="ce88" table:formula="of:=SUM([.D5:.D5])" office:value-type="float" office:value="4" calcext:value-type="float">
            <text:p>4</text:p>
          </table:table-cell>
          <table:table-cell table:style-name="ce88" table:formula="of:=SUM([.E5:.E5])" office:value-type="float" office:value="3475.69199248114" calcext:value-type="float">
            <text:p>3476</text:p>
          </table:table-cell>
          <table:table-cell table:number-columns-repeated="4"/>
          <table:table-cell table:style-name="ce116"/>
          <table:table-cell table:number-columns-repeated="16374"/>
        </table:table-row>
        <table:table-row table:style-name="ro15">
          <table:table-cell table:style-name="ce54" office:value-type="string" calcext:value-type="string">
            <text:p>Tasa de Crecimiento de Poblacion</text:p>
          </table:table-cell>
          <table:table-cell table:style-name="ce54" table:number-columns-repeated="2"/>
          <table:table-cell table:style-name="ce89" table:formula="of:=+[$POBLACION.G18]" office:value-type="percentage" office:value="0.000172900740005089" calcext:value-type="percentage">
            <text:p>0.02 %</text:p>
          </table:table-cell>
          <table:table-cell/>
          <table:table-cell table:style-name="ce96"/>
          <table:table-cell table:style-name="ce101"/>
          <table:table-cell table:style-name="ce62"/>
          <table:table-cell table:style-name="ce111" table:number-columns-repeated="4"/>
          <table:table-cell table:number-columns-repeated="16372"/>
        </table:table-row>
        <table:table-row table:style-name="ro15">
          <table:table-cell table:style-name="ce55" table:number-columns-repeated="5"/>
          <table:table-cell table:style-name="ce96"/>
          <table:table-cell table:style-name="ce101"/>
          <table:table-cell table:style-name="ce62"/>
          <table:table-cell table:style-name="ce111" table:number-columns-repeated="4"/>
          <table:table-cell table:number-columns-repeated="16372"/>
        </table:table-row>
        <table:table-row table:style-name="ro15">
          <table:table-cell table:style-name="ce56" office:value-type="string" calcext:value-type="string" table:number-columns-spanned="7" table:number-rows-spanned="1">
            <text:p>RECREOS Y RESTAURANTES EN LA CIUDAD DE PUQUIO</text:p>
          </table:table-cell>
          <table:covered-table-cell table:number-columns-repeated="6" table:style-name="ce56"/>
          <table:table-cell table:style-name="ce107"/>
          <table:table-cell table:style-name="ce111"/>
          <table:table-cell/>
          <table:table-cell table:style-name="ce111" table:number-columns-repeated="2"/>
          <table:table-cell table:number-columns-repeated="16372"/>
        </table:table-row>
        <table:table-row table:style-name="ro16">
          <table:table-cell table:style-name="ce57" office:value-type="string" calcext:value-type="string">
            <text:p>AÑO</text:p>
          </table:table-cell>
          <table:table-cell table:style-name="ce57" office:value-type="string" calcext:value-type="string" table:number-columns-spanned="2" table:number-rows-spanned="1">
            <text:p>DEMANDA TOTAL RECREOS Y RESTAURANTES</text:p>
          </table:table-cell>
          <table:covered-table-cell table:style-name="ce82"/>
          <table:table-cell table:style-name="ce90" office:value-type="string" calcext:value-type="string" table:number-columns-spanned="2" table:number-rows-spanned="1">
            <text:p>DEMANDA POTENCIAL RECREOS Y RESTAURANTES <text:s text:c="3"/>(1)</text:p>
          </table:table-cell>
          <table:covered-table-cell table:style-name="ce92"/>
          <table:table-cell table:style-name="ce90" office:value-type="string" calcext:value-type="string" table:number-columns-spanned="2" table:number-rows-spanned="1">
            <text:p>DEMANDA OBJETIVO RECREOS Y RESTAURANTES <text:s/>(2)</text:p>
          </table:table-cell>
          <table:covered-table-cell table:style-name="ce92"/>
          <table:table-cell table:number-columns-repeated="3"/>
          <table:table-cell table:style-name="ce111" table:number-columns-repeated="2"/>
          <table:table-cell table:number-columns-repeated="16372"/>
        </table:table-row>
        <table:table-row table:style-name="ro15">
          <table:table-cell table:style-name="ce58" office:value-type="float" office:value="2020" calcext:value-type="float">
            <text:p>2020</text:p>
          </table:table-cell>
          <table:table-cell table:style-name="ce70" office:value-type="float" office:value="10" calcext:value-type="float" table:number-columns-spanned="2" table:number-rows-spanned="1">
            <text:p>10</text:p>
          </table:table-cell>
          <table:covered-table-cell table:style-name="ce83"/>
          <table:table-cell table:style-name="ce91" table:formula="of:=[.B11]*0.6" office:value-type="float" office:value="6" calcext:value-type="float" table:number-columns-spanned="2" table:number-rows-spanned="1">
            <text:p>6</text:p>
          </table:table-cell>
          <table:covered-table-cell table:style-name="ce93"/>
          <table:table-cell table:style-name="ce91" table:formula="of:=[.B11]*0.5" office:value-type="float" office:value="5" calcext:value-type="float" table:number-columns-spanned="2" table:number-rows-spanned="1">
            <text:p>5</text:p>
          </table:table-cell>
          <table:covered-table-cell table:style-name="ce93"/>
          <table:table-cell table:number-columns-repeated="3"/>
          <table:table-cell table:style-name="ce111" table:number-columns-repeated="2"/>
          <table:table-cell table:number-columns-repeated="16372"/>
        </table:table-row>
        <table:table-row table:style-name="ro15">
          <table:table-cell table:style-name="ce58" table:formula="of:=+[.A11]+1" office:value-type="float" office:value="2021" calcext:value-type="float">
            <text:p>2021</text:p>
          </table:table-cell>
          <table:table-cell table:style-name="ce71" table:formula="of:=+[.B11]*(1+[.$D$7])" office:value-type="float" office:value="10.0017290074001" calcext:value-type="float" table:number-columns-spanned="2" table:number-rows-spanned="1">
            <text:p>10</text:p>
          </table:table-cell>
          <table:covered-table-cell table:style-name="ce84"/>
          <table:table-cell table:style-name="ce91" table:formula="of:=[.B12]*0.6" office:value-type="float" office:value="6.00103740444003" calcext:value-type="float" table:number-columns-spanned="2" table:number-rows-spanned="1">
            <text:p>6</text:p>
          </table:table-cell>
          <table:covered-table-cell table:style-name="ce93"/>
          <table:table-cell table:style-name="ce91" table:formula="of:=[.B12]*0.5" office:value-type="float" office:value="5.00086450370003" calcext:value-type="float" table:number-columns-spanned="2" table:number-rows-spanned="1">
            <text:p>5</text:p>
          </table:table-cell>
          <table:covered-table-cell table:style-name="ce93"/>
          <table:table-cell table:style-name="ce107"/>
          <table:table-cell table:style-name="ce111"/>
          <table:table-cell/>
          <table:table-cell table:style-name="ce111" table:number-columns-repeated="2"/>
          <table:table-cell table:number-columns-repeated="16372"/>
        </table:table-row>
        <table:table-row table:style-name="ro15">
          <table:table-cell table:style-name="ce58" table:formula="of:=+[.A12]+1" office:value-type="float" office:value="2022" calcext:value-type="float">
            <text:p>2022</text:p>
          </table:table-cell>
          <table:table-cell table:style-name="ce71" table:formula="of:=+[.B12]*(1+[.$D$7])" office:value-type="float" office:value="10.0034583137468" calcext:value-type="float" table:number-columns-spanned="2" table:number-rows-spanned="1">
            <text:p>10</text:p>
          </table:table-cell>
          <table:covered-table-cell table:style-name="ce84"/>
          <table:table-cell table:style-name="ce91" table:formula="of:=[.B13]*0.6" office:value-type="float" office:value="6.00207498824806" calcext:value-type="float" table:number-columns-spanned="2" table:number-rows-spanned="1">
            <text:p>6</text:p>
          </table:table-cell>
          <table:covered-table-cell table:style-name="ce93"/>
          <table:table-cell table:style-name="ce91" table:formula="of:=[.B13]*0.5" office:value-type="float" office:value="5.00172915687338" calcext:value-type="float" table:number-columns-spanned="2" table:number-rows-spanned="1">
            <text:p>5</text:p>
          </table:table-cell>
          <table:covered-table-cell table:style-name="ce93"/>
          <table:table-cell table:style-name="ce107"/>
          <table:table-cell table:style-name="ce111"/>
          <table:table-cell/>
          <table:table-cell table:style-name="ce111" table:number-columns-repeated="2"/>
          <table:table-cell table:number-columns-repeated="16372"/>
        </table:table-row>
        <table:table-row table:style-name="ro15">
          <table:table-cell table:style-name="ce58" table:formula="of:=+[.A13]+1" office:value-type="float" office:value="2023" calcext:value-type="float">
            <text:p>2023</text:p>
          </table:table-cell>
          <table:table-cell table:style-name="ce71" table:formula="of:=+[.B13]*(1+[.$D$7])" office:value-type="float" office:value="10.0051879190918" calcext:value-type="float" table:number-columns-spanned="2" table:number-rows-spanned="1">
            <text:p>10</text:p>
          </table:table-cell>
          <table:covered-table-cell table:style-name="ce84"/>
          <table:table-cell table:style-name="ce91" table:formula="of:=[.B14]*0.6" office:value-type="float" office:value="6.00311275145509" calcext:value-type="float" table:number-columns-spanned="2" table:number-rows-spanned="1">
            <text:p>6</text:p>
          </table:table-cell>
          <table:covered-table-cell table:style-name="ce93"/>
          <table:table-cell table:style-name="ce91" table:formula="of:=[.B14]*0.5" office:value-type="float" office:value="5.00259395954591" calcext:value-type="float" table:number-columns-spanned="2" table:number-rows-spanned="1">
            <text:p>5</text:p>
          </table:table-cell>
          <table:covered-table-cell table:style-name="ce93"/>
          <table:table-cell table:style-name="ce107"/>
          <table:table-cell table:style-name="ce111"/>
          <table:table-cell/>
          <table:table-cell table:style-name="ce111" table:number-columns-repeated="2"/>
          <table:table-cell table:number-columns-repeated="16372"/>
        </table:table-row>
        <table:table-row table:style-name="ro15">
          <table:table-cell table:style-name="ce58" table:formula="of:=+[.A14]+1" office:value-type="float" office:value="2024" calcext:value-type="float">
            <text:p>2024</text:p>
          </table:table-cell>
          <table:table-cell table:style-name="ce71" table:formula="of:=+[.B14]*(1+[.$D$7])" office:value-type="float" office:value="10.0069178234869" calcext:value-type="float" table:number-columns-spanned="2" table:number-rows-spanned="1">
            <text:p>10</text:p>
          </table:table-cell>
          <table:covered-table-cell table:style-name="ce84"/>
          <table:table-cell table:style-name="ce91" table:formula="of:=[.B15]*0.6" office:value-type="float" office:value="6.00415069409215" calcext:value-type="float" table:number-columns-spanned="2" table:number-rows-spanned="1">
            <text:p>6</text:p>
          </table:table-cell>
          <table:covered-table-cell table:style-name="ce93"/>
          <table:table-cell table:style-name="ce91" table:formula="of:=[.B15]*0.5" office:value-type="float" office:value="5.00345891174346" calcext:value-type="float" table:number-columns-spanned="2" table:number-rows-spanned="1">
            <text:p>5</text:p>
          </table:table-cell>
          <table:covered-table-cell table:style-name="ce93"/>
          <table:table-cell table:style-name="ce107"/>
          <table:table-cell table:style-name="ce111"/>
          <table:table-cell/>
          <table:table-cell table:style-name="ce111" table:number-columns-repeated="2"/>
          <table:table-cell table:number-columns-repeated="16372"/>
        </table:table-row>
        <table:table-row table:style-name="ro15">
          <table:table-cell table:style-name="ce58" table:formula="of:=+[.A15]+1" office:value-type="float" office:value="2025" calcext:value-type="float">
            <text:p>2025</text:p>
          </table:table-cell>
          <table:table-cell table:style-name="ce71" table:formula="of:=+[.B15]*(1+[.$D$7])" office:value-type="float" office:value="10.0086480269838" calcext:value-type="float" table:number-columns-spanned="2" table:number-rows-spanned="1">
            <text:p>10</text:p>
          </table:table-cell>
          <table:covered-table-cell table:style-name="ce84"/>
          <table:table-cell table:style-name="ce91" table:formula="of:=[.B16]*0.6" office:value-type="float" office:value="6.00518881619026" calcext:value-type="float" table:number-columns-spanned="2" table:number-rows-spanned="1">
            <text:p>6</text:p>
          </table:table-cell>
          <table:covered-table-cell table:style-name="ce93"/>
          <table:table-cell table:style-name="ce91" table:formula="of:=[.B16]*0.5" office:value-type="float" office:value="5.00432401349188" calcext:value-type="float" table:number-columns-spanned="2" table:number-rows-spanned="1">
            <text:p>5</text:p>
          </table:table-cell>
          <table:covered-table-cell table:style-name="ce93"/>
          <table:table-cell table:style-name="ce107"/>
          <table:table-cell table:style-name="ce111"/>
          <table:table-cell/>
          <table:table-cell table:style-name="ce111" table:number-columns-repeated="2"/>
          <table:table-cell table:number-columns-repeated="16372"/>
        </table:table-row>
        <table:table-row table:style-name="ro15">
          <table:table-cell table:style-name="ce59" office:value-type="string" calcext:value-type="string" table:number-columns-spanned="4" table:number-rows-spanned="1">
            <text:p>(*) Proyección de la población con una tasa de crecimiento del 0.02%</text:p>
          </table:table-cell>
          <table:covered-table-cell table:number-columns-repeated="3" table:style-name="ce59"/>
          <table:table-cell/>
          <table:table-cell table:style-name="ce97"/>
          <table:table-cell table:style-name="ce102"/>
          <table:table-cell table:number-columns-repeated="16377"/>
        </table:table-row>
        <table:table-row table:style-name="ro15">
          <table:table-cell table:style-name="ce60" office:value-type="string" calcext:value-type="string" table:number-columns-spanned="4" table:number-rows-spanned="1">
            <text:p>(1) 60% <text:s/>de <text:s/>recreos y restaurantes con intensión de compra</text:p>
          </table:table-cell>
          <table:covered-table-cell table:number-columns-repeated="3" table:style-name="ce61"/>
          <table:table-cell/>
          <table:table-cell table:style-name="ce98"/>
          <table:table-cell table:style-name="ce103"/>
          <table:table-cell table:style-name="ce108" table:number-columns-spanned="5" table:number-rows-spanned="1"/>
          <table:covered-table-cell table:number-columns-repeated="4" table:style-name="ce55"/>
          <table:table-cell table:number-columns-repeated="16372"/>
        </table:table-row>
        <table:table-row table:style-name="ro15">
          <table:table-cell table:style-name="ce60" office:value-type="string" calcext:value-type="string" table:number-columns-spanned="4" table:number-rows-spanned="1">
            <text:p>(2) 50% de recreos y restaurantes que compran el cuy</text:p>
          </table:table-cell>
          <table:covered-table-cell table:number-columns-repeated="3" table:style-name="ce61"/>
          <table:table-cell/>
          <table:table-cell table:style-name="ce98"/>
          <table:table-cell table:style-name="ce104"/>
          <table:table-cell table:style-name="ce109" table:number-columns-spanned="5" table:number-rows-spanned="3"/>
          <table:covered-table-cell table:number-columns-repeated="4" table:style-name="ce110"/>
          <table:table-cell table:number-columns-repeated="16372"/>
        </table:table-row>
        <table:table-row table:style-name="ro15">
          <table:table-cell table:style-name="ce61" office:value-type="string" calcext:value-type="string">
            <text:p>(3) consumo promedio de cuyes 88 und por recreo/mes</text:p>
          </table:table-cell>
          <table:table-cell table:style-name="ce61" table:number-columns-repeated="3"/>
          <table:table-cell table:style-name="ce74"/>
          <table:table-cell table:style-name="ce99"/>
          <table:table-cell table:style-name="ce103"/>
          <table:covered-table-cell table:number-columns-repeated="5" table:style-name="ce110"/>
          <table:table-cell table:number-columns-repeated="16372"/>
        </table:table-row>
        <table:table-row table:style-name="ro15">
          <table:table-cell table:style-name="ce62" office:value-type="string" calcext:value-type="string">
            <text:p>10 recreos y restaurantes</text:p>
          </table:table-cell>
          <table:table-cell table:style-name="ce62" table:number-columns-repeated="3"/>
          <table:table-cell table:style-name="ce94"/>
          <table:table-cell table:style-name="ce99"/>
          <table:table-cell table:style-name="ce105"/>
          <table:covered-table-cell table:number-columns-repeated="5" table:style-name="ce110"/>
          <table:table-cell table:number-columns-repeated="16372"/>
        </table:table-row>
        <table:table-row table:style-name="ro15">
          <table:table-cell table:style-name="ce60" office:value-type="string" calcext:value-type="string" table:number-columns-spanned="4" table:number-rows-spanned="1">
            <text:p>Fuente: Encuesta octubre 2020 elaboración: propia</text:p>
          </table:table-cell>
          <table:covered-table-cell table:number-columns-repeated="3" table:style-name="ce61"/>
          <table:table-cell table:number-columns-repeated="3"/>
          <table:table-cell table:style-name="ce107"/>
          <table:table-cell table:style-name="ce111"/>
          <table:table-cell/>
          <table:table-cell table:style-name="ce111" table:number-columns-repeated="2"/>
          <table:table-cell table:number-columns-repeated="16372"/>
        </table:table-row>
        <table:table-row table:style-name="ro15">
          <table:table-cell table:number-columns-repeated="4"/>
          <table:table-cell table:style-name="ce95"/>
          <table:table-cell table:number-columns-repeated="2"/>
          <table:table-cell table:style-name="ce107"/>
          <table:table-cell table:style-name="ce111"/>
          <table:table-cell/>
          <table:table-cell table:style-name="ce111" table:number-columns-repeated="2"/>
          <table:table-cell table:number-columns-repeated="16372"/>
        </table:table-row>
        <table:table-row table:style-name="ro15">
          <table:table-cell table:number-columns-repeated="4"/>
          <table:table-cell table:style-name="ce95"/>
          <table:table-cell/>
          <table:table-cell table:style-name="ce95"/>
          <table:table-cell table:style-name="ce107"/>
          <table:table-cell table:style-name="ce111"/>
          <table:table-cell/>
          <table:table-cell table:style-name="ce111" table:number-columns-repeated="2"/>
          <table:table-cell table:number-columns-repeated="16372"/>
        </table:table-row>
        <table:table-row table:style-name="ro15">
          <table:table-cell table:number-columns-repeated="7"/>
          <table:table-cell table:style-name="ce107"/>
          <table:table-cell table:style-name="ce111"/>
          <table:table-cell/>
          <table:table-cell table:style-name="ce111" table:number-columns-repeated="2"/>
          <table:table-cell table:number-columns-repeated="16372"/>
        </table:table-row>
        <table:table-row table:style-name="ro17">
          <table:table-cell table:style-name="ce63" office:value-type="string" calcext:value-type="string" table:number-columns-spanned="12" table:number-rows-spanned="1">
            <text:p>DEMANDA TOTAL, POTENCIAL Y OBJETIVO DE FAMILIA EN LA CIUDAD DE PUQUIO: 2020-2025</text:p>
          </table:table-cell>
          <table:covered-table-cell table:number-columns-repeated="11" table:style-name="ce63"/>
          <table:table-cell/>
          <table:table-cell table:style-name="ce117"/>
          <table:table-cell table:number-columns-repeated="16370"/>
        </table:table-row>
        <table:table-row table:style-name="ro18">
          <table:table-cell table:style-name="ce64" office:value-type="string" calcext:value-type="string">
            <text:p>AÑO</text:p>
          </table:table-cell>
          <table:table-cell table:style-name="ce72" office:value-type="string" calcext:value-type="string">
            <text:p>DEMANDA TOTAL DE FAMILIAS <text:s text:c="10"/>(*)</text:p>
          </table:table-cell>
          <table:table-cell table:style-name="ce72" office:value-type="string" calcext:value-type="string">
            <text:p>DEMANDA POTECIAL DE FAMILIAS <text:s text:c="12"/>(1)</text:p>
          </table:table-cell>
          <table:table-cell table:style-name="ce72" office:value-type="string" calcext:value-type="string">
            <text:p>DEMANDA OBJETIVO DE FAMILIAS <text:s text:c="20"/>(2)</text:p>
          </table:table-cell>
          <table:table-cell table:style-name="ce72" office:value-type="string" calcext:value-type="string">
            <text:p>CONSUMO PERCAPITA (Kg) <text:s text:c="31"/>(3)</text:p>
          </table:table-cell>
          <table:table-cell table:style-name="ce72" office:value-type="string" calcext:value-type="string">
            <text:p>PESO PROMEDIO DE COMERCIALIZACIÓN (Kg)</text:p>
          </table:table-cell>
          <table:table-cell table:style-name="ce72" office:value-type="string" calcext:value-type="string">
            <text:p>DEMANDA TOTAL EN <text:s text:c="31"/>(Kg)</text:p>
          </table:table-cell>
          <table:table-cell table:style-name="ce72" office:value-type="string" calcext:value-type="string">
            <text:p>DEMANDA TOTAL EN UNIDADES</text:p>
          </table:table-cell>
          <table:table-cell table:style-name="ce72" office:value-type="string" calcext:value-type="string">
            <text:p>DEMANDA POTENCIAL EN (Kg)</text:p>
          </table:table-cell>
          <table:table-cell table:style-name="ce72" office:value-type="string" calcext:value-type="string">
            <text:p>DEMANDA POTENCIAL EN UNIDADES</text:p>
          </table:table-cell>
          <table:table-cell table:style-name="ce72" office:value-type="string" calcext:value-type="string">
            <text:p>DEMANDA OBJETIVO EN (Kg)</text:p>
          </table:table-cell>
          <table:table-cell table:style-name="ce72" office:value-type="string" calcext:value-type="string">
            <text:p>DEMANDA OBJETIVO EN UNIDADES / AÑO</text:p>
          </table:table-cell>
          <table:table-cell/>
          <table:table-cell table:style-name="ce117"/>
          <table:table-cell table:number-columns-repeated="16370"/>
        </table:table-row>
        <table:table-row table:style-name="ro15">
          <table:table-cell table:style-name="ce36" office:value-type="float" office:value="2020" calcext:value-type="float">
            <text:p>2020</text:p>
          </table:table-cell>
          <table:table-cell table:style-name="ce73" table:formula="of:=+[.E6]" office:value-type="float" office:value="3475.69199248114" calcext:value-type="float">
            <text:p>3476</text:p>
          </table:table-cell>
          <table:table-cell table:style-name="ce45" table:formula="of:=[.B28]*0.4" office:value-type="float" office:value="1390.27679699246" calcext:value-type="float">
            <text:p>1390</text:p>
          </table:table-cell>
          <table:table-cell table:style-name="ce45" table:formula="of:=[.B28]*0.3" office:value-type="float" office:value="1042.70759774434" calcext:value-type="float">
            <text:p>1043</text:p>
          </table:table-cell>
          <table:table-cell table:style-name="ce36" office:value-type="float" office:value="35" calcext:value-type="float">
            <text:p>35</text:p>
          </table:table-cell>
          <table:table-cell table:style-name="ce100" office:value-type="float" office:value="0.9" calcext:value-type="float">
            <text:p>0.900</text:p>
          </table:table-cell>
          <table:table-cell table:style-name="ce39" table:formula="of:=[.B28]*[.E28]" office:value-type="float" office:value="121649.21973684" calcext:value-type="float">
            <text:p>121,649</text:p>
          </table:table-cell>
          <table:table-cell table:style-name="ce39" table:formula="of:=[.G28]/[.F28]" office:value-type="float" office:value="135165.7997076" calcext:value-type="float">
            <text:p>135,166</text:p>
          </table:table-cell>
          <table:table-cell table:style-name="ce39" table:formula="of:=[.C28]*[.E28]" office:value-type="float" office:value="48659.687894736" calcext:value-type="float">
            <text:p>48,660</text:p>
          </table:table-cell>
          <table:table-cell table:style-name="ce39" table:formula="of:=[.I28]/0.9" office:value-type="float" office:value="54066.3198830399" calcext:value-type="float">
            <text:p>54,066</text:p>
          </table:table-cell>
          <table:table-cell table:style-name="ce39" table:formula="of:=[.D28]*[.E28]" office:value-type="float" office:value="36494.765921052" calcext:value-type="float">
            <text:p>36,495</text:p>
          </table:table-cell>
          <table:table-cell table:style-name="ce39" table:formula="of:=[.K28]/0.9" office:value-type="float" office:value="40549.73991228" calcext:value-type="float">
            <text:p>40,550</text:p>
          </table:table-cell>
          <table:table-cell table:style-name="ce117" table:number-columns-repeated="16372"/>
        </table:table-row>
        <table:table-row table:style-name="ro15">
          <table:table-cell table:style-name="ce36" table:formula="of:=+[.A28]+1" office:value-type="float" office:value="2021" calcext:value-type="float">
            <text:p>2021</text:p>
          </table:table-cell>
          <table:table-cell table:style-name="ce45" table:formula="of:=+[.B28]*(1+[.$D$7])" office:value-type="float" office:value="3476.29294219867" calcext:value-type="float">
            <text:p>3476</text:p>
          </table:table-cell>
          <table:table-cell table:style-name="ce45" table:formula="of:=[.B29]*0.4" office:value-type="float" office:value="1390.51717687947" calcext:value-type="float">
            <text:p>1391</text:p>
          </table:table-cell>
          <table:table-cell table:style-name="ce45" table:formula="of:=[.B29]*0.3" office:value-type="float" office:value="1042.8878826596" calcext:value-type="float">
            <text:p>1043</text:p>
          </table:table-cell>
          <table:table-cell table:style-name="ce36" office:value-type="float" office:value="35" calcext:value-type="float">
            <text:p>35</text:p>
          </table:table-cell>
          <table:table-cell table:style-name="ce100" office:value-type="float" office:value="0.9" calcext:value-type="float">
            <text:p>0.900</text:p>
          </table:table-cell>
          <table:table-cell table:style-name="ce39" table:formula="of:=[.B29]*[.E29]" office:value-type="float" office:value="121670.252976953" calcext:value-type="float">
            <text:p>121,670</text:p>
          </table:table-cell>
          <table:table-cell table:style-name="ce39" table:formula="of:=[.G29]/[.F29]" office:value-type="float" office:value="135189.169974393" calcext:value-type="float">
            <text:p>135,189</text:p>
          </table:table-cell>
          <table:table-cell table:style-name="ce39" table:formula="of:=[.C29]*[.E29]" office:value-type="float" office:value="48668.1011907814" calcext:value-type="float">
            <text:p>48,668</text:p>
          </table:table-cell>
          <table:table-cell table:style-name="ce39" table:formula="of:=[.I29]/0.9" office:value-type="float" office:value="54075.6679897571" calcext:value-type="float">
            <text:p>54,076</text:p>
          </table:table-cell>
          <table:table-cell table:style-name="ce39" table:formula="of:=[.D29]*[.E29]" office:value-type="float" office:value="36501.075893086" calcext:value-type="float">
            <text:p>36,501</text:p>
          </table:table-cell>
          <table:table-cell table:style-name="ce39" table:formula="of:=[.K29]/0.9" office:value-type="float" office:value="40556.7509923178" calcext:value-type="float">
            <text:p>40,557</text:p>
          </table:table-cell>
          <table:table-cell table:style-name="ce117" table:number-columns-repeated="16372"/>
        </table:table-row>
        <table:table-row table:style-name="ro15">
          <table:table-cell table:style-name="ce36" table:formula="of:=+[.A29]+1" office:value-type="float" office:value="2022" calcext:value-type="float">
            <text:p>2022</text:p>
          </table:table-cell>
          <table:table-cell table:style-name="ce45" table:formula="of:=+[.B29]*(1+[.$D$7])" office:value-type="float" office:value="3476.89399582085" calcext:value-type="float">
            <text:p>3477</text:p>
          </table:table-cell>
          <table:table-cell table:style-name="ce45" table:formula="of:=[.B30]*0.4" office:value-type="float" office:value="1390.75759832834" calcext:value-type="float">
            <text:p>1391</text:p>
          </table:table-cell>
          <table:table-cell table:style-name="ce45" table:formula="of:=[.B30]*0.3" office:value-type="float" office:value="1043.06819874625" calcext:value-type="float">
            <text:p>1043</text:p>
          </table:table-cell>
          <table:table-cell table:style-name="ce36" office:value-type="float" office:value="35" calcext:value-type="float">
            <text:p>35</text:p>
          </table:table-cell>
          <table:table-cell table:style-name="ce100" office:value-type="float" office:value="0.9" calcext:value-type="float">
            <text:p>0.900</text:p>
          </table:table-cell>
          <table:table-cell table:style-name="ce39" table:formula="of:=[.B30]*[.E30]" office:value-type="float" office:value="121691.28985373" calcext:value-type="float">
            <text:p>121,691</text:p>
          </table:table-cell>
          <table:table-cell table:style-name="ce39" table:formula="of:=[.G30]/[.F30]" office:value-type="float" office:value="135212.544281922" calcext:value-type="float">
            <text:p>135,213</text:p>
          </table:table-cell>
          <table:table-cell table:style-name="ce39" table:formula="of:=[.C30]*[.E30]" office:value-type="float" office:value="48676.5159414919" calcext:value-type="float">
            <text:p>48,677</text:p>
          </table:table-cell>
          <table:table-cell table:style-name="ce39" table:formula="of:=[.I30]/0.9" office:value-type="float" office:value="54085.0177127688" calcext:value-type="float">
            <text:p>54,085</text:p>
          </table:table-cell>
          <table:table-cell table:style-name="ce39" table:formula="of:=[.D30]*[.E30]" office:value-type="float" office:value="36507.3869561189" calcext:value-type="float">
            <text:p>36,507</text:p>
          </table:table-cell>
          <table:table-cell table:style-name="ce39" table:formula="of:=[.K30]/0.9" office:value-type="float" office:value="40563.7632845766" calcext:value-type="float">
            <text:p>40,564</text:p>
          </table:table-cell>
          <table:table-cell table:style-name="ce117" table:number-columns-repeated="16372"/>
        </table:table-row>
        <table:table-row table:style-name="ro15">
          <table:table-cell table:style-name="ce36" table:formula="of:=+[.A30]+1" office:value-type="float" office:value="2023" calcext:value-type="float">
            <text:p>2023</text:p>
          </table:table-cell>
          <table:table-cell table:style-name="ce45" table:formula="of:=+[.B30]*(1+[.$D$7])" office:value-type="float" office:value="3477.49515336565" calcext:value-type="float">
            <text:p>3477</text:p>
          </table:table-cell>
          <table:table-cell table:style-name="ce45" table:formula="of:=[.B31]*0.4" office:value-type="float" office:value="1390.99806134626" calcext:value-type="float">
            <text:p>1391</text:p>
          </table:table-cell>
          <table:table-cell table:style-name="ce45" table:formula="of:=[.B31]*0.3" office:value-type="float" office:value="1043.24854600969" calcext:value-type="float">
            <text:p>1043</text:p>
          </table:table-cell>
          <table:table-cell table:style-name="ce36" office:value-type="float" office:value="35" calcext:value-type="float">
            <text:p>35</text:p>
          </table:table-cell>
          <table:table-cell table:style-name="ce100" office:value-type="float" office:value="0.9" calcext:value-type="float">
            <text:p>0.900</text:p>
          </table:table-cell>
          <table:table-cell table:style-name="ce39" table:formula="of:=[.B31]*[.E31]" office:value-type="float" office:value="121712.330367798" calcext:value-type="float">
            <text:p>121,712</text:p>
          </table:table-cell>
          <table:table-cell table:style-name="ce39" table:formula="of:=[.G31]/[.F31]" office:value-type="float" office:value="135235.922630886" calcext:value-type="float">
            <text:p>135,236</text:p>
          </table:table-cell>
          <table:table-cell table:style-name="ce39" table:formula="of:=[.C31]*[.E31]" office:value-type="float" office:value="48684.9321471191" calcext:value-type="float">
            <text:p>48,685</text:p>
          </table:table-cell>
          <table:table-cell table:style-name="ce39" table:formula="of:=[.I31]/0.9" office:value-type="float" office:value="54094.3690523545" calcext:value-type="float">
            <text:p>54,094</text:p>
          </table:table-cell>
          <table:table-cell table:style-name="ce39" table:formula="of:=[.D31]*[.E31]" office:value-type="float" office:value="36513.6991103393" calcext:value-type="float">
            <text:p>36,514</text:p>
          </table:table-cell>
          <table:table-cell table:style-name="ce39" table:formula="of:=[.K31]/0.9" office:value-type="float" office:value="40570.7767892659" calcext:value-type="float">
            <text:p>40,571</text:p>
          </table:table-cell>
          <table:table-cell table:style-name="ce117" table:number-columns-repeated="16372"/>
        </table:table-row>
        <table:table-row table:style-name="ro15">
          <table:table-cell table:style-name="ce36" table:formula="of:=+[.A31]+1" office:value-type="float" office:value="2024" calcext:value-type="float">
            <text:p>2024</text:p>
          </table:table-cell>
          <table:table-cell table:style-name="ce45" table:formula="of:=+[.B31]*(1+[.$D$7])" office:value-type="float" office:value="3478.09641485103" calcext:value-type="float">
            <text:p>3478</text:p>
          </table:table-cell>
          <table:table-cell table:style-name="ce45" table:formula="of:=[.B32]*0.4" office:value-type="float" office:value="1391.23856594041" calcext:value-type="float">
            <text:p>1391</text:p>
          </table:table-cell>
          <table:table-cell table:style-name="ce45" table:formula="of:=[.B32]*0.3" office:value-type="float" office:value="1043.42892445531" calcext:value-type="float">
            <text:p>1043</text:p>
          </table:table-cell>
          <table:table-cell table:style-name="ce36" office:value-type="float" office:value="35" calcext:value-type="float">
            <text:p>35</text:p>
          </table:table-cell>
          <table:table-cell table:style-name="ce100" office:value-type="float" office:value="0.9" calcext:value-type="float">
            <text:p>0.900</text:p>
          </table:table-cell>
          <table:table-cell table:style-name="ce39" table:formula="of:=[.B32]*[.E32]" office:value-type="float" office:value="121733.374519786" calcext:value-type="float">
            <text:p>121,733</text:p>
          </table:table-cell>
          <table:table-cell table:style-name="ce39" table:formula="of:=[.G32]/[.F32]" office:value-type="float" office:value="135259.305021984" calcext:value-type="float">
            <text:p>135,259</text:p>
          </table:table-cell>
          <table:table-cell table:style-name="ce39" table:formula="of:=[.C32]*[.E32]" office:value-type="float" office:value="48693.3498079144" calcext:value-type="float">
            <text:p>48,693</text:p>
          </table:table-cell>
          <table:table-cell table:style-name="ce39" table:formula="of:=[.I32]/0.9" office:value-type="float" office:value="54103.7220087937" calcext:value-type="float">
            <text:p>54,104</text:p>
          </table:table-cell>
          <table:table-cell table:style-name="ce39" table:formula="of:=[.D32]*[.E32]" office:value-type="float" office:value="36520.0123559358" calcext:value-type="float">
            <text:p>36,520</text:p>
          </table:table-cell>
          <table:table-cell table:style-name="ce39" table:formula="of:=[.K32]/0.9" office:value-type="float" office:value="40577.7915065953" calcext:value-type="float">
            <text:p>40,578</text:p>
          </table:table-cell>
          <table:table-cell table:style-name="ce117" table:number-columns-repeated="16372"/>
        </table:table-row>
        <table:table-row table:style-name="ro15">
          <table:table-cell table:style-name="ce36" table:formula="of:=+[.A32]+1" office:value-type="float" office:value="2025" calcext:value-type="float">
            <text:p>2025</text:p>
          </table:table-cell>
          <table:table-cell table:style-name="ce45" table:formula="of:=+[.B32]*(1+[.$D$7])" office:value-type="float" office:value="3478.69778029496" calcext:value-type="float">
            <text:p>3479</text:p>
          </table:table-cell>
          <table:table-cell table:style-name="ce45" table:formula="of:=[.B33]*0.4" office:value-type="float" office:value="1391.47911211799" calcext:value-type="float">
            <text:p>1391</text:p>
          </table:table-cell>
          <table:table-cell table:style-name="ce45" table:formula="of:=[.B33]*0.3" office:value-type="float" office:value="1043.60933408849" calcext:value-type="float">
            <text:p>1044</text:p>
          </table:table-cell>
          <table:table-cell table:style-name="ce36" office:value-type="float" office:value="35" calcext:value-type="float">
            <text:p>35</text:p>
          </table:table-cell>
          <table:table-cell table:style-name="ce100" office:value-type="float" office:value="0.9" calcext:value-type="float">
            <text:p>0.900</text:p>
          </table:table-cell>
          <table:table-cell table:style-name="ce39" table:formula="of:=[.B33]*[.E33]" office:value-type="float" office:value="121754.422310324" calcext:value-type="float">
            <text:p>121,754</text:p>
          </table:table-cell>
          <table:table-cell table:style-name="ce39" table:formula="of:=[.G33]/[.F33]" office:value-type="float" office:value="135282.691455915" calcext:value-type="float">
            <text:p>135,283</text:p>
          </table:table-cell>
          <table:table-cell table:style-name="ce39" table:formula="of:=[.C33]*[.E33]" office:value-type="float" office:value="48701.7689241295" calcext:value-type="float">
            <text:p>48,702</text:p>
          </table:table-cell>
          <table:table-cell table:style-name="ce39" table:formula="of:=[.I33]/0.9" office:value-type="float" office:value="54113.0765823661" calcext:value-type="float">
            <text:p>54,113</text:p>
          </table:table-cell>
          <table:table-cell table:style-name="ce39" table:formula="of:=[.D33]*[.E33]" office:value-type="float" office:value="36526.3266930971" calcext:value-type="float">
            <text:p>36,526</text:p>
          </table:table-cell>
          <table:table-cell table:style-name="ce39" table:formula="of:=[.K33]/0.9" office:value-type="float" office:value="40584.8074367746" calcext:value-type="float">
            <text:p>40,585</text:p>
          </table:table-cell>
          <table:table-cell table:style-name="ce117" table:number-columns-repeated="16372"/>
        </table:table-row>
        <table:table-row table:style-name="ro15">
          <table:table-cell table:style-name="ce37" office:value-type="string" calcext:value-type="string" table:number-columns-spanned="12" table:number-rows-spanned="1">
            <text:p>(*) Proyección de la población con una tasa de crecimiento del 0.02%</text:p>
          </table:table-cell>
          <table:covered-table-cell table:number-columns-repeated="11" table:style-name="ce37"/>
          <table:table-cell table:number-columns-repeated="16372"/>
        </table:table-row>
        <table:table-row table:style-name="ro15">
          <table:table-cell table:style-name="ce65" office:value-type="string" calcext:value-type="string" table:number-columns-spanned="12" table:number-rows-spanned="1">
            <text:p>(1) 40% del Total de familias con intensión de compra <text:s text:c="2"/></text:p>
          </table:table-cell>
          <table:covered-table-cell table:number-columns-repeated="11" table:style-name="ce74"/>
          <table:table-cell table:number-columns-repeated="16372"/>
        </table:table-row>
        <table:table-row table:style-name="ro15">
          <table:table-cell table:style-name="ce65" office:value-type="string" calcext:value-type="string" table:number-columns-spanned="12" table:number-rows-spanned="1">
            <text:p>(2) 30% de las familias adquieren <text:s/>cuy para consumo en sus casas seg A Y B</text:p>
          </table:table-cell>
          <table:covered-table-cell table:number-columns-repeated="11" table:style-name="ce74"/>
          <table:table-cell table:number-columns-repeated="16372"/>
        </table:table-row>
        <table:table-row table:style-name="ro15">
          <table:table-cell table:style-name="ce65" office:value-type="string" calcext:value-type="string" table:number-columns-spanned="12" table:number-rows-spanned="1">
            <text:p>(3) Consumo percapita 35 Kg MINAG, por familia</text:p>
          </table:table-cell>
          <table:covered-table-cell table:number-columns-repeated="11" table:style-name="ce74"/>
          <table:table-cell/>
          <table:table-cell table:style-name="ce117"/>
          <table:table-cell table:number-columns-repeated="16370"/>
        </table:table-row>
        <table:table-row table:style-name="ro15">
          <table:table-cell table:style-name="ce65" office:value-type="string" calcext:value-type="string" table:number-columns-spanned="12" table:number-rows-spanned="1">
            <text:p>(*) Para el presente proyecto se considera como ciudad <text:s/>Puquio</text:p>
          </table:table-cell>
          <table:covered-table-cell table:number-columns-repeated="11" table:style-name="ce74"/>
          <table:table-cell table:number-columns-repeated="16372"/>
        </table:table-row>
        <table:table-row table:style-name="ro15">
          <table:table-cell table:style-name="ce65" office:value-type="string" calcext:value-type="string" table:number-columns-spanned="12" table:number-rows-spanned="1">
            <text:p>Fuente: Encuesta octubre 2020 Elaboración Propia</text:p>
          </table:table-cell>
          <table:covered-table-cell table:number-columns-repeated="11" table:style-name="ce74"/>
          <table:table-cell table:number-columns-repeated="16372"/>
        </table:table-row>
        <table:table-row table:style-name="ro15">
          <table:table-cell table:number-columns-repeated="13"/>
          <table:table-cell table:style-name="ce117"/>
          <table:table-cell table:number-columns-repeated="16370"/>
        </table:table-row>
        <table:table-row table:style-name="ro15">
          <table:table-cell table:style-name="ce66" office:value-type="string" calcext:value-type="string" table:number-columns-spanned="12" table:number-rows-spanned="1">
            <text:p>DEMANDA TOTAL, POTENCIAL Y OBJETIVO DE RECREOS Y RESTAURANTES EN LA CIUDAD DE PUQUIO: 2020-2025</text:p>
          </table:table-cell>
          <table:covered-table-cell table:number-columns-repeated="11" table:style-name="ce66"/>
          <table:table-cell table:number-columns-repeated="16372"/>
        </table:table-row>
        <table:table-row table:style-name="ro19">
          <table:table-cell table:style-name="ce67" office:value-type="string" calcext:value-type="string">
            <text:p>AÑO</text:p>
          </table:table-cell>
          <table:table-cell table:style-name="ce75" office:value-type="string" calcext:value-type="string">
            <text:p>DEMANDA TOTAL DE RECREOS Y RESTAURANTES (*)</text:p>
          </table:table-cell>
          <table:table-cell table:style-name="ce85" office:value-type="string" calcext:value-type="string">
            <text:p>DEMANDA POTECIAL DE RECREOS Y RESTAURANTES (1)</text:p>
          </table:table-cell>
          <table:table-cell table:style-name="ce85" office:value-type="string" calcext:value-type="string">
            <text:p>DEMANDA OBJETIVO DE RECREOS Y RESTAURANTES <text:s text:c="7"/>(2)</text:p>
          </table:table-cell>
          <table:table-cell table:style-name="ce85" office:value-type="string" calcext:value-type="string">
            <text:p>CONSUMO PROMEDIO/MENSUAL EN UNIDADES <text:s text:c="13"/>(3)</text:p>
          </table:table-cell>
          <table:table-cell table:style-name="ce85" office:value-type="string" calcext:value-type="string">
            <text:p>PESO PROMEDIO DE COMERCIALIZACIÓN (Kg)</text:p>
          </table:table-cell>
          <table:table-cell table:style-name="ce85" office:value-type="string" calcext:value-type="string">
            <text:p>DEMANDA TOTAL EN UNIDADES / MES</text:p>
          </table:table-cell>
          <table:table-cell table:style-name="ce85" office:value-type="string" calcext:value-type="string">
            <text:p>DEMANDA TOTAL EN UNIDADES / AÑO</text:p>
          </table:table-cell>
          <table:table-cell table:style-name="ce85" office:value-type="string" calcext:value-type="string">
            <text:p>DEMANDA POTENCIAL EN UNIDADES / MES</text:p>
          </table:table-cell>
          <table:table-cell table:style-name="ce85" office:value-type="string" calcext:value-type="string">
            <text:p>DEMANDA POTENCIAL EN UNIDADES / AÑO</text:p>
          </table:table-cell>
          <table:table-cell table:style-name="ce85" office:value-type="string" calcext:value-type="string">
            <text:p>DEMANDA OBJETIVO EN UNIDADES / MES</text:p>
          </table:table-cell>
          <table:table-cell table:style-name="ce85" office:value-type="string" calcext:value-type="string">
            <text:p>DEMANDA OBJETIVO EN UNIDADES / AÑO</text:p>
          </table:table-cell>
          <table:table-cell table:number-columns-repeated="16372"/>
        </table:table-row>
        <table:table-row table:style-name="ro15">
          <table:table-cell table:style-name="ce36" table:formula="of:=+[.A28]" office:value-type="float" office:value="2020" calcext:value-type="float">
            <text:p>2020</text:p>
          </table:table-cell>
          <table:table-cell table:style-name="ce76" office:value-type="float" office:value="10" calcext:value-type="float">
            <text:p>10</text:p>
          </table:table-cell>
          <table:table-cell table:style-name="ce45" table:formula="of:=[.B43]*0.6" office:value-type="float" office:value="6" calcext:value-type="float">
            <text:p>6</text:p>
          </table:table-cell>
          <table:table-cell table:style-name="ce45" table:formula="of:=[.B43]*0.5" office:value-type="float" office:value="5" calcext:value-type="float">
            <text:p>5</text:p>
          </table:table-cell>
          <table:table-cell table:style-name="ce36" office:value-type="float" office:value="30" calcext:value-type="float">
            <text:p>30</text:p>
          </table:table-cell>
          <table:table-cell table:style-name="ce100" office:value-type="float" office:value="0.9" calcext:value-type="float">
            <text:p>0.900</text:p>
          </table:table-cell>
          <table:table-cell table:style-name="ce39" table:formula="of:=[.B43]*[.E43]" office:value-type="float" office:value="300" calcext:value-type="float">
            <text:p>300</text:p>
          </table:table-cell>
          <table:table-cell table:style-name="ce39" table:formula="of:=[.G43]*12" office:value-type="float" office:value="3600" calcext:value-type="float">
            <text:p>3,600</text:p>
          </table:table-cell>
          <table:table-cell table:style-name="ce39" table:formula="of:=[.C43]*[.E43]" office:value-type="float" office:value="180" calcext:value-type="float">
            <text:p>180</text:p>
          </table:table-cell>
          <table:table-cell table:style-name="ce39" table:formula="of:=[.I43]*12" office:value-type="float" office:value="2160" calcext:value-type="float">
            <text:p>2,160</text:p>
          </table:table-cell>
          <table:table-cell table:style-name="ce39" table:formula="of:=[.D43]*[.E43]" office:value-type="float" office:value="150" calcext:value-type="float">
            <text:p>150</text:p>
          </table:table-cell>
          <table:table-cell table:style-name="ce39" table:formula="of:=[.K43]*12" office:value-type="float" office:value="1800" calcext:value-type="float">
            <text:p>1,800</text:p>
          </table:table-cell>
          <table:table-cell table:number-columns-repeated="16372"/>
        </table:table-row>
        <table:table-row table:style-name="ro15">
          <table:table-cell table:style-name="ce36" table:formula="of:=+[.A29]" office:value-type="float" office:value="2021" calcext:value-type="float">
            <text:p>2021</text:p>
          </table:table-cell>
          <table:table-cell table:style-name="ce45" table:formula="of:=+[.B43]*(1+[.$D$7])" office:value-type="float" office:value="10.0017290074001" calcext:value-type="float">
            <text:p>10</text:p>
          </table:table-cell>
          <table:table-cell table:style-name="ce45" table:formula="of:=[.B44]*0.6" office:value-type="float" office:value="6.00103740444003" calcext:value-type="float">
            <text:p>6</text:p>
          </table:table-cell>
          <table:table-cell table:style-name="ce45" table:formula="of:=[.B44]*0.5" office:value-type="float" office:value="5.00086450370003" calcext:value-type="float">
            <text:p>5</text:p>
          </table:table-cell>
          <table:table-cell table:style-name="ce36" office:value-type="float" office:value="30" calcext:value-type="float">
            <text:p>30</text:p>
          </table:table-cell>
          <table:table-cell table:style-name="ce100" office:value-type="float" office:value="0.9" calcext:value-type="float">
            <text:p>0.900</text:p>
          </table:table-cell>
          <table:table-cell table:style-name="ce39" table:formula="of:=[.B44]*[.E44]" office:value-type="float" office:value="300.051870222002" calcext:value-type="float">
            <text:p>300</text:p>
          </table:table-cell>
          <table:table-cell table:style-name="ce39" table:formula="of:=[.G44]*12" office:value-type="float" office:value="3600.62244266402" calcext:value-type="float">
            <text:p>3,601</text:p>
          </table:table-cell>
          <table:table-cell table:style-name="ce39" table:formula="of:=[.C44]*[.E44]" office:value-type="float" office:value="180.031122133201" calcext:value-type="float">
            <text:p>180</text:p>
          </table:table-cell>
          <table:table-cell table:style-name="ce39" table:formula="of:=[.I44]*12" office:value-type="float" office:value="2160.37346559841" calcext:value-type="float">
            <text:p>2,160</text:p>
          </table:table-cell>
          <table:table-cell table:style-name="ce39" table:formula="of:=[.D44]*[.E44]" office:value-type="float" office:value="150.025935111001" calcext:value-type="float">
            <text:p>150</text:p>
          </table:table-cell>
          <table:table-cell table:style-name="ce39" table:formula="of:=[.K44]*12" office:value-type="float" office:value="1800.31122133201" calcext:value-type="float">
            <text:p>1,800</text:p>
          </table:table-cell>
          <table:table-cell table:style-name="ce117" table:number-columns-repeated="16372"/>
        </table:table-row>
        <table:table-row table:style-name="ro15">
          <table:table-cell table:style-name="ce36" table:formula="of:=+[.A30]" office:value-type="float" office:value="2022" calcext:value-type="float">
            <text:p>2022</text:p>
          </table:table-cell>
          <table:table-cell table:style-name="ce45" table:formula="of:=+[.B44]*(1+[.$D$7])" office:value-type="float" office:value="10.0034583137468" calcext:value-type="float">
            <text:p>10</text:p>
          </table:table-cell>
          <table:table-cell table:style-name="ce45" table:formula="of:=[.B45]*0.6" office:value-type="float" office:value="6.00207498824806" calcext:value-type="float">
            <text:p>6</text:p>
          </table:table-cell>
          <table:table-cell table:style-name="ce45" table:formula="of:=[.B45]*0.5" office:value-type="float" office:value="5.00172915687338" calcext:value-type="float">
            <text:p>5</text:p>
          </table:table-cell>
          <table:table-cell table:style-name="ce36" office:value-type="float" office:value="30" calcext:value-type="float">
            <text:p>30</text:p>
          </table:table-cell>
          <table:table-cell table:style-name="ce100" office:value-type="float" office:value="0.9" calcext:value-type="float">
            <text:p>0.900</text:p>
          </table:table-cell>
          <table:table-cell table:style-name="ce39" table:formula="of:=[.B45]*[.E45]" office:value-type="float" office:value="300.103749412403" calcext:value-type="float">
            <text:p>300</text:p>
          </table:table-cell>
          <table:table-cell table:style-name="ce39" table:formula="of:=[.G45]*12" office:value-type="float" office:value="3601.24499294883" calcext:value-type="float">
            <text:p>3,601</text:p>
          </table:table-cell>
          <table:table-cell table:style-name="ce39" table:formula="of:=[.C45]*[.E45]" office:value-type="float" office:value="180.062249647442" calcext:value-type="float">
            <text:p>180</text:p>
          </table:table-cell>
          <table:table-cell table:style-name="ce39" table:formula="of:=[.I45]*12" office:value-type="float" office:value="2160.7469957693" calcext:value-type="float">
            <text:p>2,161</text:p>
          </table:table-cell>
          <table:table-cell table:style-name="ce39" table:formula="of:=[.D45]*[.E45]" office:value-type="float" office:value="150.051874706201" calcext:value-type="float">
            <text:p>150</text:p>
          </table:table-cell>
          <table:table-cell table:style-name="ce39" table:formula="of:=[.K45]*12" office:value-type="float" office:value="1800.62249647442" calcext:value-type="float">
            <text:p>1,801</text:p>
          </table:table-cell>
          <table:table-cell table:style-name="ce117" table:number-columns-repeated="16372"/>
        </table:table-row>
        <table:table-row table:style-name="ro15">
          <table:table-cell table:style-name="ce36" table:formula="of:=+[.A31]" office:value-type="float" office:value="2023" calcext:value-type="float">
            <text:p>2023</text:p>
          </table:table-cell>
          <table:table-cell table:style-name="ce45" table:formula="of:=+[.B45]*(1+[.$D$7])" office:value-type="float" office:value="10.0051879190918" calcext:value-type="float">
            <text:p>10</text:p>
          </table:table-cell>
          <table:table-cell table:style-name="ce45" table:formula="of:=[.B46]*0.6" office:value-type="float" office:value="6.00311275145509" calcext:value-type="float">
            <text:p>6</text:p>
          </table:table-cell>
          <table:table-cell table:style-name="ce45" table:formula="of:=[.B46]*0.5" office:value-type="float" office:value="5.00259395954591" calcext:value-type="float">
            <text:p>5</text:p>
          </table:table-cell>
          <table:table-cell table:style-name="ce36" office:value-type="float" office:value="30" calcext:value-type="float">
            <text:p>30</text:p>
          </table:table-cell>
          <table:table-cell table:style-name="ce100" office:value-type="float" office:value="0.9" calcext:value-type="float">
            <text:p>0.900</text:p>
          </table:table-cell>
          <table:table-cell table:style-name="ce39" table:formula="of:=[.B46]*[.E46]" office:value-type="float" office:value="300.155637572755" calcext:value-type="float">
            <text:p>300</text:p>
          </table:table-cell>
          <table:table-cell table:style-name="ce39" table:formula="of:=[.G46]*12" office:value-type="float" office:value="3601.86765087305" calcext:value-type="float">
            <text:p>3,602</text:p>
          </table:table-cell>
          <table:table-cell table:style-name="ce39" table:formula="of:=[.C46]*[.E46]" office:value-type="float" office:value="180.093382543653" calcext:value-type="float">
            <text:p>180</text:p>
          </table:table-cell>
          <table:table-cell table:style-name="ce39" table:formula="of:=[.I46]*12" office:value-type="float" office:value="2161.12059052383" calcext:value-type="float">
            <text:p>2,161</text:p>
          </table:table-cell>
          <table:table-cell table:style-name="ce39" table:formula="of:=[.D46]*[.E46]" office:value-type="float" office:value="150.077818786377" calcext:value-type="float">
            <text:p>150</text:p>
          </table:table-cell>
          <table:table-cell table:style-name="ce39" table:formula="of:=[.K46]*12" office:value-type="float" office:value="1800.93382543653" calcext:value-type="float">
            <text:p>1,801</text:p>
          </table:table-cell>
          <table:table-cell table:style-name="ce117" table:number-columns-repeated="16372"/>
        </table:table-row>
        <table:table-row table:style-name="ro15">
          <table:table-cell table:style-name="ce36" table:formula="of:=+[.A32]" office:value-type="float" office:value="2024" calcext:value-type="float">
            <text:p>2024</text:p>
          </table:table-cell>
          <table:table-cell table:style-name="ce45" table:formula="of:=+[.B46]*(1+[.$D$7])" office:value-type="float" office:value="10.0069178234869" calcext:value-type="float">
            <text:p>10</text:p>
          </table:table-cell>
          <table:table-cell table:style-name="ce45" table:formula="of:=[.B47]*0.6" office:value-type="float" office:value="6.00415069409215" calcext:value-type="float">
            <text:p>6</text:p>
          </table:table-cell>
          <table:table-cell table:style-name="ce45" table:formula="of:=[.B47]*0.5" office:value-type="float" office:value="5.00345891174346" calcext:value-type="float">
            <text:p>5</text:p>
          </table:table-cell>
          <table:table-cell table:style-name="ce36" office:value-type="float" office:value="30" calcext:value-type="float">
            <text:p>30</text:p>
          </table:table-cell>
          <table:table-cell table:style-name="ce100" office:value-type="float" office:value="0.9" calcext:value-type="float">
            <text:p>0.900</text:p>
          </table:table-cell>
          <table:table-cell table:style-name="ce39" table:formula="of:=[.B47]*[.E47]" office:value-type="float" office:value="300.207534704608" calcext:value-type="float">
            <text:p>300</text:p>
          </table:table-cell>
          <table:table-cell table:style-name="ce39" table:formula="of:=[.G47]*12" office:value-type="float" office:value="3602.49041645529" calcext:value-type="float">
            <text:p>3,602</text:p>
          </table:table-cell>
          <table:table-cell table:style-name="ce39" table:formula="of:=[.C47]*[.E47]" office:value-type="float" office:value="180.124520822765" calcext:value-type="float">
            <text:p>180</text:p>
          </table:table-cell>
          <table:table-cell table:style-name="ce39" table:formula="of:=[.I47]*12" office:value-type="float" office:value="2161.49424987317" calcext:value-type="float">
            <text:p>2,161</text:p>
          </table:table-cell>
          <table:table-cell table:style-name="ce39" table:formula="of:=[.D47]*[.E47]" office:value-type="float" office:value="150.103767352304" calcext:value-type="float">
            <text:p>150</text:p>
          </table:table-cell>
          <table:table-cell table:style-name="ce39" table:formula="of:=[.K47]*12" office:value-type="float" office:value="1801.24520822765" calcext:value-type="float">
            <text:p>1,801</text:p>
          </table:table-cell>
          <table:table-cell table:style-name="ce117" table:number-columns-repeated="16372"/>
        </table:table-row>
        <table:table-row table:style-name="ro15">
          <table:table-cell table:style-name="ce36" table:formula="of:=+[.A33]" office:value-type="float" office:value="2025" calcext:value-type="float">
            <text:p>2025</text:p>
          </table:table-cell>
          <table:table-cell table:style-name="ce45" table:formula="of:=+[.B47]*(1+[.$D$7])" office:value-type="float" office:value="10.0086480269838" calcext:value-type="float">
            <text:p>10</text:p>
          </table:table-cell>
          <table:table-cell table:style-name="ce45" table:formula="of:=[.B48]*0.6" office:value-type="float" office:value="6.00518881619026" calcext:value-type="float">
            <text:p>6</text:p>
          </table:table-cell>
          <table:table-cell table:style-name="ce45" table:formula="of:=[.B48]*0.5" office:value-type="float" office:value="5.00432401349188" calcext:value-type="float">
            <text:p>5</text:p>
          </table:table-cell>
          <table:table-cell table:style-name="ce36" office:value-type="float" office:value="30" calcext:value-type="float">
            <text:p>30</text:p>
          </table:table-cell>
          <table:table-cell table:style-name="ce100" office:value-type="float" office:value="0.9" calcext:value-type="float">
            <text:p>0.900</text:p>
          </table:table-cell>
          <table:table-cell table:style-name="ce39" table:formula="of:=[.B48]*[.E48]" office:value-type="float" office:value="300.259440809513" calcext:value-type="float">
            <text:p>300</text:p>
          </table:table-cell>
          <table:table-cell table:style-name="ce39" table:formula="of:=[.G48]*12" office:value-type="float" office:value="3603.11328971416" calcext:value-type="float">
            <text:p>3,603</text:p>
          </table:table-cell>
          <table:table-cell table:style-name="ce39" table:formula="of:=[.C48]*[.E48]" office:value-type="float" office:value="180.155664485708" calcext:value-type="float">
            <text:p>180</text:p>
          </table:table-cell>
          <table:table-cell table:style-name="ce39" table:formula="of:=[.I48]*12" office:value-type="float" office:value="2161.86797382849" calcext:value-type="float">
            <text:p>2,162</text:p>
          </table:table-cell>
          <table:table-cell table:style-name="ce39" table:formula="of:=[.D48]*[.E48]" office:value-type="float" office:value="150.129720404757" calcext:value-type="float">
            <text:p>150</text:p>
          </table:table-cell>
          <table:table-cell table:style-name="ce39" table:formula="of:=[.K48]*12" office:value-type="float" office:value="1801.55664485708" calcext:value-type="float">
            <text:p>1,802</text:p>
          </table:table-cell>
          <table:table-cell table:style-name="ce117" table:number-columns-repeated="16372"/>
        </table:table-row>
        <table:table-row table:style-name="ro15">
          <table:table-cell table:style-name="ce37" office:value-type="string" calcext:value-type="string" table:number-columns-spanned="12" table:number-rows-spanned="1">
            <text:p>(*) Proyección de la población con una tasa de crecimiento del 0.02%</text:p>
          </table:table-cell>
          <table:covered-table-cell table:number-columns-repeated="11" table:style-name="ce37"/>
          <table:table-cell table:number-columns-repeated="16372"/>
        </table:table-row>
        <table:table-row table:style-name="ro15">
          <table:table-cell table:style-name="ce68" office:value-type="string" calcext:value-type="string" table:number-columns-spanned="12" table:number-rows-spanned="1">
            <text:p>(1) 60% <text:s/>de <text:s/>recreos y restaurantes con intensión de compra</text:p>
          </table:table-cell>
          <table:covered-table-cell table:number-columns-repeated="11" table:style-name="ce68"/>
          <table:table-cell table:number-columns-repeated="16372"/>
        </table:table-row>
        <table:table-row table:style-name="ro15">
          <table:table-cell table:style-name="ce65" office:value-type="string" calcext:value-type="string" table:number-columns-spanned="12" table:number-rows-spanned="1">
            <text:p>(2) 50% de Recreos y Restaurantes que compran el cuy </text:p>
          </table:table-cell>
          <table:covered-table-cell table:number-columns-repeated="11" table:style-name="ce74"/>
          <table:table-cell table:number-columns-repeated="16372"/>
        </table:table-row>
        <table:table-row table:style-name="ro15">
          <table:table-cell table:style-name="ce65" office:value-type="string" calcext:value-type="string" table:number-columns-spanned="12" table:number-rows-spanned="1">
            <text:p>(3) Consumo promedio de cuyes 30 Unidades por recreo/Mes - Encuesta octubre 2020</text:p>
          </table:table-cell>
          <table:covered-table-cell table:number-columns-repeated="11" table:style-name="ce74"/>
          <table:table-cell/>
          <table:table-cell table:style-name="ce106"/>
          <table:table-cell table:number-columns-repeated="16370"/>
        </table:table-row>
        <table:table-row table:style-name="ro15">
          <table:table-cell table:style-name="ce65" office:value-type="string" calcext:value-type="string" table:number-columns-spanned="12" table:number-rows-spanned="1">
            <text:p>(*) Para el presente proyecto se considera como ciudad <text:s/>Puquio</text:p>
          </table:table-cell>
          <table:covered-table-cell table:number-columns-repeated="11" table:style-name="ce74"/>
          <table:table-cell table:number-columns-repeated="16372"/>
        </table:table-row>
        <table:table-row table:style-name="ro15">
          <table:table-cell table:style-name="ce65" office:value-type="string" calcext:value-type="string" table:number-columns-spanned="12" table:number-rows-spanned="1">
            <text:p>Fuente: Encuesta octubre 2020 Elaboración Propia</text:p>
          </table:table-cell>
          <table:covered-table-cell table:number-columns-repeated="11" table:style-name="ce74"/>
          <table:table-cell table:number-columns-repeated="16372"/>
        </table:table-row>
        <table:table-row table:style-name="ro15" table:number-rows-repeated="2">
          <table:table-cell table:number-columns-repeated="16384"/>
        </table:table-row>
        <table:table-row table:style-name="ro20">
          <table:table-cell table:number-columns-repeated="2"/>
          <table:table-cell table:style-name="ce85" office:value-type="string" calcext:value-type="string">
            <text:p>AÑO</text:p>
          </table:table-cell>
          <table:table-cell table:style-name="ce85" office:value-type="string" calcext:value-type="string">
            <text:p>DEMANDA OBJETIVO EN LA CIUDAD DE AYACUCHO EN UNIDAD / AÑO</text:p>
          </table:table-cell>
          <table:table-cell table:style-name="ce85" office:value-type="string" calcext:value-type="string">
            <text:p>DEMANDA OBJETIVO EN RECREOS Y RESTAURANTES EN <text:s/>UNIDADES / AÑO</text:p>
          </table:table-cell>
          <table:table-cell table:style-name="ce85" office:value-type="string" calcext:value-type="string">
            <text:p>DEMANDA OBJETIVO TOTAL UNID / AÑO</text:p>
          </table:table-cell>
          <table:table-cell table:style-name="ce106" table:number-columns-repeated="2"/>
          <table:table-cell table:style-name="ce112" table:number-columns-repeated="4"/>
          <table:table-cell table:style-name="ce114"/>
          <table:table-cell table:number-columns-repeated="16371"/>
        </table:table-row>
        <table:table-row table:style-name="ro15">
          <table:table-cell table:number-columns-repeated="2"/>
          <table:table-cell table:style-name="ce36" table:formula="of:=+[.A43]" office:value-type="float" office:value="2020" calcext:value-type="float">
            <text:p>2020</text:p>
          </table:table-cell>
          <table:table-cell table:style-name="ce39" table:formula="of:=+[.L28]" office:value-type="float" office:value="40549.73991228" calcext:value-type="float">
            <text:p>40,550</text:p>
          </table:table-cell>
          <table:table-cell table:style-name="ce39" table:formula="of:=+[.L43]" office:value-type="float" office:value="1800" calcext:value-type="float">
            <text:p>1,800</text:p>
          </table:table-cell>
          <table:table-cell table:style-name="ce39" table:formula="of:=[.D58]+[.E58]" office:value-type="float" office:value="42349.73991228" calcext:value-type="float">
            <text:p>42,350</text:p>
          </table:table-cell>
          <table:table-cell table:style-name="ce106" table:number-columns-repeated="2"/>
          <table:table-cell table:style-name="ce113" table:number-columns-repeated="4"/>
          <table:table-cell table:style-name="ce114"/>
          <table:table-cell table:number-columns-repeated="16371"/>
        </table:table-row>
        <table:table-row table:style-name="ro15">
          <table:table-cell table:number-columns-repeated="2"/>
          <table:table-cell table:style-name="ce36" table:formula="of:=+[.A44]" office:value-type="float" office:value="2021" calcext:value-type="float">
            <text:p>2021</text:p>
          </table:table-cell>
          <table:table-cell table:style-name="ce39" table:formula="of:=+[.L29]" office:value-type="float" office:value="40556.7509923178" calcext:value-type="float">
            <text:p>40,557</text:p>
          </table:table-cell>
          <table:table-cell table:style-name="ce39" table:formula="of:=+[.L44]" office:value-type="float" office:value="1800.31122133201" calcext:value-type="float">
            <text:p>1,800</text:p>
          </table:table-cell>
          <table:table-cell table:style-name="ce39" table:formula="of:=[.D59]+[.E59]" office:value-type="float" office:value="42357.0622136498" calcext:value-type="float">
            <text:p>42,357</text:p>
          </table:table-cell>
          <table:table-cell table:style-name="ce106" table:number-columns-repeated="2"/>
          <table:table-cell table:style-name="ce113" table:number-columns-repeated="4"/>
          <table:table-cell table:style-name="ce114"/>
          <table:table-cell table:number-columns-repeated="16371"/>
        </table:table-row>
        <table:table-row table:style-name="ro15">
          <table:table-cell table:number-columns-repeated="2"/>
          <table:table-cell table:style-name="ce36" table:formula="of:=+[.A45]" office:value-type="float" office:value="2022" calcext:value-type="float">
            <text:p>2022</text:p>
          </table:table-cell>
          <table:table-cell table:style-name="ce39" table:formula="of:=+[.L30]" office:value-type="float" office:value="40563.7632845766" calcext:value-type="float">
            <text:p>40,564</text:p>
          </table:table-cell>
          <table:table-cell table:style-name="ce39" table:formula="of:=+[.L45]" office:value-type="float" office:value="1800.62249647442" calcext:value-type="float">
            <text:p>1,801</text:p>
          </table:table-cell>
          <table:table-cell table:style-name="ce39" table:formula="of:=[.D60]+[.E60]" office:value-type="float" office:value="42364.385781051" calcext:value-type="float">
            <text:p>42,364</text:p>
          </table:table-cell>
          <table:table-cell table:style-name="ce106" table:number-columns-repeated="2"/>
          <table:table-cell table:style-name="ce113" table:number-columns-repeated="4"/>
          <table:table-cell table:style-name="ce114"/>
          <table:table-cell table:number-columns-repeated="16371"/>
        </table:table-row>
        <table:table-row table:style-name="ro15">
          <table:table-cell table:number-columns-repeated="2"/>
          <table:table-cell table:style-name="ce36" table:formula="of:=+[.A46]" office:value-type="float" office:value="2023" calcext:value-type="float">
            <text:p>2023</text:p>
          </table:table-cell>
          <table:table-cell table:style-name="ce39" table:formula="of:=+[.L31]" office:value-type="float" office:value="40570.7767892659" calcext:value-type="float">
            <text:p>40,571</text:p>
          </table:table-cell>
          <table:table-cell table:style-name="ce39" table:formula="of:=+[.L46]" office:value-type="float" office:value="1800.93382543653" calcext:value-type="float">
            <text:p>1,801</text:p>
          </table:table-cell>
          <table:table-cell table:style-name="ce39" table:formula="of:=[.D61]+[.E61]" office:value-type="float" office:value="42371.7106147024" calcext:value-type="float">
            <text:p>42,372</text:p>
          </table:table-cell>
          <table:table-cell table:style-name="ce106" table:number-columns-repeated="2"/>
          <table:table-cell table:style-name="ce113" table:number-columns-repeated="4"/>
          <table:table-cell table:style-name="ce114"/>
          <table:table-cell table:number-columns-repeated="16371"/>
        </table:table-row>
        <table:table-row table:style-name="ro15">
          <table:table-cell table:number-columns-repeated="2"/>
          <table:table-cell table:style-name="ce36" table:formula="of:=+[.A47]" office:value-type="float" office:value="2024" calcext:value-type="float">
            <text:p>2024</text:p>
          </table:table-cell>
          <table:table-cell table:style-name="ce39" table:formula="of:=+[.L32]" office:value-type="float" office:value="40577.7915065953" calcext:value-type="float">
            <text:p>40,578</text:p>
          </table:table-cell>
          <table:table-cell table:style-name="ce39" table:formula="of:=+[.L47]" office:value-type="float" office:value="1801.24520822765" calcext:value-type="float">
            <text:p>1,801</text:p>
          </table:table-cell>
          <table:table-cell table:style-name="ce39" table:formula="of:=[.D62]+[.E62]" office:value-type="float" office:value="42379.036714823" calcext:value-type="float">
            <text:p>42,379</text:p>
          </table:table-cell>
          <table:table-cell table:style-name="ce106" table:number-columns-repeated="2"/>
          <table:table-cell table:style-name="ce113" table:number-columns-repeated="4"/>
          <table:table-cell table:style-name="ce114"/>
          <table:table-cell table:number-columns-repeated="16371"/>
        </table:table-row>
        <table:table-row table:style-name="ro15">
          <table:table-cell table:number-columns-repeated="2"/>
          <table:table-cell table:style-name="ce36" table:formula="of:=+[.A48]" office:value-type="float" office:value="2025" calcext:value-type="float">
            <text:p>2025</text:p>
          </table:table-cell>
          <table:table-cell table:style-name="ce39" table:formula="of:=+[.L33]" office:value-type="float" office:value="40584.8074367746" calcext:value-type="float">
            <text:p>40,585</text:p>
          </table:table-cell>
          <table:table-cell table:style-name="ce39" table:formula="of:=+[.L48]" office:value-type="float" office:value="1801.55664485708" calcext:value-type="float">
            <text:p>1,802</text:p>
          </table:table-cell>
          <table:table-cell table:style-name="ce39" table:formula="of:=[.D63]+[.E63]" office:value-type="float" office:value="42386.3640816317" calcext:value-type="float">
            <text:p>42,386</text:p>
          </table:table-cell>
          <table:table-cell table:style-name="ce106" table:number-columns-repeated="2"/>
          <table:table-cell table:style-name="ce113" table:number-columns-repeated="4"/>
          <table:table-cell table:style-name="ce114"/>
          <table:table-cell table:number-columns-repeated="16371"/>
        </table:table-row>
        <table:table-row table:style-name="ro15">
          <table:table-cell/>
          <table:table-cell table:style-name="ce77"/>
          <table:table-cell table:style-name="ce77" office:value-type="string" calcext:value-type="string">
            <text:p>Fuente: Encuesta octubre Elaboración Propia</text:p>
          </table:table-cell>
          <table:table-cell table:style-name="ce77" table:number-columns-repeated="5"/>
          <table:table-cell table:style-name="ce114" table:number-columns-repeated="5"/>
          <table:table-cell table:number-columns-repeated="16371"/>
        </table:table-row>
        <table:table-row table:style-name="ro15">
          <table:table-cell table:style-name="ce69" table:number-columns-spanned="8" table:number-rows-spanned="1"/>
          <table:covered-table-cell table:number-columns-repeated="7"/>
          <table:table-cell table:number-columns-repeated="16376"/>
        </table:table-row>
        <table:table-row table:style-name="ro15" table:number-rows-repeated="1048510">
          <table:table-cell table:number-columns-repeated="16384"/>
        </table:table-row>
        <table:table-row table:style-name="ro15">
          <table:table-cell table:number-columns-repeated="16384"/>
        </table:table-row>
      </table:table>
      <table:table table:name="OFERTA" table:style-name="ta3">
        <table:table-column table:style-name="co23" table:default-cell-style-name="ce118"/>
        <table:table-column table:style-name="co24" table:default-cell-style-name="ce118"/>
        <table:table-column table:style-name="co25" table:default-cell-style-name="ce118"/>
        <table:table-column table:style-name="co26" table:default-cell-style-name="ce118"/>
        <table:table-column table:style-name="co27" table:default-cell-style-name="ce118"/>
        <table:table-column table:style-name="co28" table:default-cell-style-name="ce118"/>
        <table:table-column table:style-name="co29" table:default-cell-style-name="ce118"/>
        <table:table-column table:style-name="co30" table:default-cell-style-name="ce118"/>
        <table:table-column table:style-name="co31" table:default-cell-style-name="ce118"/>
        <table:table-column table:style-name="co29" table:default-cell-style-name="ce118"/>
        <table:table-column table:style-name="co32" table:default-cell-style-name="ce118"/>
        <table:table-column table:style-name="co1" table:number-columns-repeated="4" table:default-cell-style-name="ce118"/>
        <table:table-column table:style-name="co32" table:default-cell-style-name="ce118"/>
        <table:table-column table:style-name="co33" table:default-cell-style-name="ce118"/>
        <table:table-column table:style-name="co1" table:number-columns-repeated="7" table:default-cell-style-name="ce118"/>
        <table:table-column table:style-name="co34" table:default-cell-style-name="ce118"/>
        <table:table-column table:style-name="co1" table:default-cell-style-name="ce118"/>
        <table:table-column table:style-name="co35" table:default-cell-style-name="ce118"/>
        <table:table-column table:style-name="co36" table:default-cell-style-name="ce118"/>
        <table:table-column table:style-name="co37" table:default-cell-style-name="ce118"/>
        <table:table-column table:style-name="co1" table:number-columns-repeated="2" table:default-cell-style-name="ce118"/>
        <table:table-column table:style-name="co36" table:default-cell-style-name="ce118"/>
        <table:table-column table:style-name="co7" table:default-cell-style-name="ce118"/>
        <table:table-column table:style-name="co1" table:number-columns-repeated="16351" table:default-cell-style-name="ce118"/>
        <table:table-row table:style-name="ro2">
          <table:table-cell table:number-columns-repeated="16"/>
          <table:table-cell table:style-name="ce163" office:value-type="string" calcext:value-type="string" table:number-columns-spanned="9" table:number-rows-spanned="1">
            <text:p>Ayacucho: población de cuyes (unidades) por años, según provincias, 2012 -2019</text:p>
          </table:table-cell>
          <table:covered-table-cell table:number-columns-repeated="8" table:style-name="ce163"/>
          <table:table-cell/>
          <table:table-cell table:style-name="ce163" office:value-type="string" calcext:value-type="string" table:number-columns-spanned="9" table:number-rows-spanned="1">
            <text:p>Poblacion de Cuy Destino al Mercado de Puquio</text:p>
          </table:table-cell>
          <table:covered-table-cell table:number-columns-repeated="8" table:style-name="ce163"/>
          <table:table-cell table:style-name="ce189" table:number-columns-repeated="5"/>
          <table:table-cell table:number-columns-repeated="16344"/>
        </table:table-row>
        <table:table-row table:style-name="ro21">
          <table:table-cell/>
          <table:table-cell table:style-name="ce119" office:value-type="string" calcext:value-type="string" table:number-columns-spanned="13" table:number-rows-spanned="1">
            <text:p>DINAMICA POBLACIONAL CON PROYECTO</text:p>
          </table:table-cell>
          <table:covered-table-cell table:number-columns-repeated="12" table:style-name="ce119"/>
          <table:table-cell table:number-columns-repeated="2"/>
          <table:table-cell table:style-name="ce164" office:value-type="string" calcext:value-type="string" table:number-columns-spanned="1" table:number-rows-spanned="2">
            <text:p>PROVINCIAS</text:p>
          </table:table-cell>
          <table:table-cell table:style-name="ce164" office:value-type="string" calcext:value-type="string" table:number-columns-spanned="8" table:number-rows-spanned="1">
            <text:p>AÑOS</text:p>
          </table:table-cell>
          <table:covered-table-cell table:number-columns-repeated="6" table:style-name="ce176"/>
          <table:covered-table-cell table:style-name="ce182"/>
          <table:table-cell/>
          <table:table-cell table:style-name="ce164" office:value-type="string" calcext:value-type="string" table:number-columns-spanned="1" table:number-rows-spanned="2">
            <text:p>PROVINCIAS</text:p>
          </table:table-cell>
          <table:table-cell table:style-name="ce164" office:value-type="string" calcext:value-type="string" table:number-columns-spanned="8" table:number-rows-spanned="1">
            <text:p>AÑOS</text:p>
          </table:table-cell>
          <table:covered-table-cell table:number-columns-repeated="7" table:style-name="ce164"/>
          <table:table-cell table:style-name="ce189" table:number-columns-repeated="5"/>
          <table:table-cell table:number-columns-repeated="16344"/>
        </table:table-row>
        <table:table-row table:style-name="ro2">
          <table:table-cell table:number-columns-repeated="2"/>
          <table:table-cell table:style-name="ce123" table:number-columns-repeated="9"/>
          <table:table-cell table:number-columns-repeated="5"/>
          <table:covered-table-cell table:style-name="ce165"/>
          <table:table-cell table:style-name="ce164" office:value-type="float" office:value="2012" calcext:value-type="float">
            <text:p>2012</text:p>
          </table:table-cell>
          <table:table-cell table:style-name="ce164" office:value-type="float" office:value="2013" calcext:value-type="float">
            <text:p>2013</text:p>
          </table:table-cell>
          <table:table-cell table:style-name="ce164" office:value-type="float" office:value="2014" calcext:value-type="float">
            <text:p>2014</text:p>
          </table:table-cell>
          <table:table-cell table:style-name="ce164" office:value-type="float" office:value="2015" calcext:value-type="float">
            <text:p>2015</text:p>
          </table:table-cell>
          <table:table-cell table:style-name="ce164" office:value-type="float" office:value="2016" calcext:value-type="float">
            <text:p>2016</text:p>
          </table:table-cell>
          <table:table-cell table:style-name="ce164" office:value-type="float" office:value="2017" calcext:value-type="float">
            <text:p>2017</text:p>
          </table:table-cell>
          <table:table-cell table:style-name="ce164" office:value-type="float" office:value="2018" calcext:value-type="float">
            <text:p>2018</text:p>
          </table:table-cell>
          <table:table-cell table:style-name="ce164" office:value-type="float" office:value="2019" calcext:value-type="float">
            <text:p>2019</text:p>
          </table:table-cell>
          <table:table-cell/>
          <table:covered-table-cell table:style-name="ce164"/>
          <table:table-cell table:style-name="ce164" office:value-type="float" office:value="2012" calcext:value-type="float">
            <text:p>2012</text:p>
          </table:table-cell>
          <table:table-cell table:style-name="ce164" office:value-type="float" office:value="2013" calcext:value-type="float">
            <text:p>2013</text:p>
          </table:table-cell>
          <table:table-cell table:style-name="ce164" office:value-type="float" office:value="2014" calcext:value-type="float">
            <text:p>2014</text:p>
          </table:table-cell>
          <table:table-cell table:style-name="ce164" office:value-type="float" office:value="2015" calcext:value-type="float">
            <text:p>2015</text:p>
          </table:table-cell>
          <table:table-cell table:style-name="ce164" office:value-type="float" office:value="2016" calcext:value-type="float">
            <text:p>2016</text:p>
          </table:table-cell>
          <table:table-cell table:style-name="ce164" office:value-type="float" office:value="2017" calcext:value-type="float">
            <text:p>2017</text:p>
          </table:table-cell>
          <table:table-cell table:style-name="ce164" office:value-type="float" office:value="2018" calcext:value-type="float">
            <text:p>2018</text:p>
          </table:table-cell>
          <table:table-cell table:style-name="ce164" office:value-type="float" office:value="2019" calcext:value-type="float">
            <text:p>2019</text:p>
          </table:table-cell>
          <table:table-cell table:style-name="ce189" table:number-columns-repeated="5"/>
          <table:table-cell table:number-columns-repeated="16344"/>
        </table:table-row>
        <table:table-row table:style-name="ro14">
          <table:table-cell/>
          <table:table-cell table:style-name="ce120" office:value-type="string" calcext:value-type="string" table:number-columns-spanned="2" table:number-rows-spanned="3">
            <text:p>EDAD TRIMEST.</text:p>
          </table:table-cell>
          <table:covered-table-cell table:style-name="ce120"/>
          <table:table-cell table:style-name="ce120" office:value-type="string" calcext:value-type="string" table:number-columns-spanned="1" table:number-rows-spanned="3">
            <text:p>Total Gasapo</text:p>
          </table:table-cell>
          <table:table-cell table:style-name="ce120" office:value-type="string" calcext:value-type="string" table:number-columns-spanned="1" table:number-rows-spanned="2">
            <text:p>Gasapos Hembra</text:p>
          </table:table-cell>
          <table:table-cell table:style-name="ce120" office:value-type="string" calcext:value-type="string" table:number-columns-spanned="1" table:number-rows-spanned="3">
            <text:p>Remplazo</text:p>
          </table:table-cell>
          <table:table-cell table:style-name="ce120" office:value-type="string" calcext:value-type="string" table:number-columns-spanned="1" table:number-rows-spanned="3">
            <text:p>Reprod. Hembra</text:p>
          </table:table-cell>
          <table:table-cell table:style-name="ce120" office:value-type="string" calcext:value-type="string" table:number-columns-spanned="1" table:number-rows-spanned="2">
            <text:p>Gasapo Macho</text:p>
          </table:table-cell>
          <table:table-cell table:style-name="ce120" office:value-type="string" calcext:value-type="string" table:number-columns-spanned="1" table:number-rows-spanned="3">
            <text:p>Reprod. Macho</text:p>
          </table:table-cell>
          <table:table-cell table:style-name="ce120" office:value-type="string" calcext:value-type="string" table:number-columns-spanned="1" table:number-rows-spanned="3">
            <text:p>Saca</text:p>
          </table:table-cell>
          <table:table-cell table:style-name="ce120" office:value-type="string" calcext:value-type="string" table:number-columns-spanned="1" table:number-rows-spanned="3">
            <text:p>Total Animal Reproduct.</text:p>
          </table:table-cell>
          <table:table-cell table:style-name="ce120" office:value-type="string" calcext:value-type="string" table:number-columns-spanned="1" table:number-rows-spanned="2">
            <text:p>Consumo Forraje Kg</text:p>
          </table:table-cell>
          <table:table-cell table:style-name="ce120" office:value-type="string" calcext:value-type="string" table:number-columns-spanned="1" table:number-rows-spanned="2">
            <text:p>Consumo Concentrado</text:p>
          </table:table-cell>
          <table:table-cell table:style-name="ce120" office:value-type="string" calcext:value-type="string" table:number-columns-spanned="1" table:number-rows-spanned="2">
            <text:p>Carcasa Kg</text:p>
          </table:table-cell>
          <table:table-cell table:number-columns-repeated="2"/>
          <table:table-cell table:style-name="ce166" office:value-type="string" calcext:value-type="string">
            <text:p>DEPARTAMENTAL</text:p>
          </table:table-cell>
          <table:table-cell table:style-name="ce172" table:formula="of:=SUM([.R5:.R15])" office:value-type="float" office:value="449887" calcext:value-type="float">
            <text:p>449,887.00</text:p>
          </table:table-cell>
          <table:table-cell table:style-name="ce172" table:formula="of:=SUM([.S5:.S15])" office:value-type="float" office:value="355140" calcext:value-type="float">
            <text:p>355,140.00</text:p>
          </table:table-cell>
          <table:table-cell table:style-name="ce172" table:formula="of:=SUM([.T5:.T15])" office:value-type="float" office:value="417718" calcext:value-type="float">
            <text:p>417,718.00</text:p>
          </table:table-cell>
          <table:table-cell table:style-name="ce172" table:formula="of:=SUM([.U5:.U15])" office:value-type="float" office:value="430360" calcext:value-type="float">
            <text:p>430,360.00</text:p>
          </table:table-cell>
          <table:table-cell table:style-name="ce172" table:formula="of:=SUM([.V5:.V15])" office:value-type="float" office:value="465817" calcext:value-type="float">
            <text:p>465,817.00</text:p>
          </table:table-cell>
          <table:table-cell table:style-name="ce172" table:formula="of:=SUM([.W5:.W15])" office:value-type="float" office:value="481144" calcext:value-type="float">
            <text:p>481,144.00</text:p>
          </table:table-cell>
          <table:table-cell table:style-name="ce172" table:formula="of:=SUM([.X5:.X15])" office:value-type="float" office:value="499255" calcext:value-type="float">
            <text:p>499,255.00</text:p>
          </table:table-cell>
          <table:table-cell table:style-name="ce172" table:formula="of:=SUM([.Y5:.Y15])" office:value-type="float" office:value="507044" calcext:value-type="float">
            <text:p>507,044.00</text:p>
          </table:table-cell>
          <table:table-cell/>
          <table:table-cell table:style-name="ce167" office:value-type="string" calcext:value-type="string">
            <text:p>LUCANAS</text:p>
          </table:table-cell>
          <table:table-cell table:style-name="ce173" table:formula="of:=+[.R10]*[.$AB$10]" office:value-type="float" office:value="13273.8" calcext:value-type="float">
            <text:p>13,273.80</text:p>
          </table:table-cell>
          <table:table-cell table:style-name="ce173" table:formula="of:=+[.S10]*[.$AB$10]" office:value-type="float" office:value="12850.8" calcext:value-type="float">
            <text:p>12,850.80</text:p>
          </table:table-cell>
          <table:table-cell table:style-name="ce173" table:formula="of:=+[.T10]*[.$AB$10]" office:value-type="float" office:value="14521.8" calcext:value-type="float">
            <text:p>14,521.80</text:p>
          </table:table-cell>
          <table:table-cell table:style-name="ce173" table:formula="of:=+[.U10]*[.$AB$10]" office:value-type="float" office:value="14356.8" calcext:value-type="float">
            <text:p>14,356.80</text:p>
          </table:table-cell>
          <table:table-cell table:style-name="ce173" table:formula="of:=+[.V10]*[.$AB$10]" office:value-type="float" office:value="15326.4" calcext:value-type="float">
            <text:p>15,326.40</text:p>
          </table:table-cell>
          <table:table-cell table:style-name="ce173" table:formula="of:=+[.W10]*[.$AB$10]" office:value-type="float" office:value="15978" calcext:value-type="float">
            <text:p>15,978.00</text:p>
          </table:table-cell>
          <table:table-cell table:style-name="ce173" table:formula="of:=+[.X10]*[.$AB$10]" office:value-type="float" office:value="14145.6" calcext:value-type="float">
            <text:p>14,145.60</text:p>
          </table:table-cell>
          <table:table-cell table:style-name="ce173" table:formula="of:=+[.Y10]*[.$AB$10]" office:value-type="float" office:value="13662.6" calcext:value-type="float">
            <text:p>13,662.60</text:p>
          </table:table-cell>
          <table:table-cell table:style-name="ce210" table:number-columns-repeated="5"/>
          <table:table-cell table:number-columns-repeated="16344"/>
        </table:table-row>
        <table:table-row table:style-name="ro10">
          <table:table-cell/>
          <table:covered-table-cell table:number-columns-repeated="13" table:style-name="ce120"/>
          <table:table-cell table:number-columns-repeated="2"/>
          <table:table-cell table:style-name="ce167" office:value-type="string" calcext:value-type="string">
            <text:p>HUAMANGA</text:p>
          </table:table-cell>
          <table:table-cell table:style-name="ce173" office:value-type="float" office:value="116383" calcext:value-type="float">
            <text:p>116,383.00</text:p>
          </table:table-cell>
          <table:table-cell table:style-name="ce173" office:value-type="float" office:value="106304" calcext:value-type="float">
            <text:p>106,304.00</text:p>
          </table:table-cell>
          <table:table-cell table:style-name="ce173" office:value-type="float" office:value="110304" calcext:value-type="float">
            <text:p>110,304.00</text:p>
          </table:table-cell>
          <table:table-cell table:style-name="ce173" office:value-type="float" office:value="115522" calcext:value-type="float">
            <text:p>115,522.00</text:p>
          </table:table-cell>
          <table:table-cell table:style-name="ce173" office:value-type="float" office:value="137489" calcext:value-type="float">
            <text:p>137,489.00</text:p>
          </table:table-cell>
          <table:table-cell table:style-name="ce173" office:value-type="float" office:value="144225" calcext:value-type="float">
            <text:p>144,225.00</text:p>
          </table:table-cell>
          <table:table-cell table:style-name="ce173" office:value-type="float" office:value="132269" calcext:value-type="float">
            <text:p>132,269.00</text:p>
          </table:table-cell>
          <table:table-cell table:style-name="ce173" office:value-type="float" office:value="137577" calcext:value-type="float">
            <text:p>137,577.00</text:p>
          </table:table-cell>
          <table:table-cell/>
          <table:table-cell table:style-name="ce167"/>
          <table:table-cell table:style-name="ce173" table:number-columns-repeated="8"/>
          <table:table-cell table:style-name="ce189" table:number-columns-repeated="5"/>
          <table:table-cell table:number-columns-repeated="16344"/>
        </table:table-row>
        <table:table-row table:style-name="ro4">
          <table:table-cell/>
          <table:covered-table-cell table:number-columns-repeated="3" table:style-name="ce120"/>
          <table:table-cell table:style-name="ce120" office:value-type="string" calcext:value-type="string">
            <text:p>00/03 Meses</text:p>
          </table:table-cell>
          <table:covered-table-cell table:number-columns-repeated="2" table:style-name="ce120"/>
          <table:table-cell table:style-name="ce120" office:value-type="string" calcext:value-type="string">
            <text:p>00/03 Meses</text:p>
          </table:table-cell>
          <table:covered-table-cell table:number-columns-repeated="3" table:style-name="ce120"/>
          <table:table-cell table:style-name="ce147" office:value-type="string" calcext:value-type="string">
            <text:p>30-40%FV</text:p>
          </table:table-cell>
          <table:table-cell table:style-name="ce147" office:value-type="string" calcext:value-type="string">
            <text:p>8,5% MS</text:p>
          </table:table-cell>
          <table:table-cell table:style-name="ce147" office:value-type="string" calcext:value-type="string">
            <text:p>80% PV</text:p>
          </table:table-cell>
          <table:table-cell table:number-columns-repeated="2"/>
          <table:table-cell table:style-name="ce167" office:value-type="string" calcext:value-type="string">
            <text:p>CANGALLO</text:p>
          </table:table-cell>
          <table:table-cell table:style-name="ce173" office:value-type="float" office:value="28790" calcext:value-type="float">
            <text:p>28,790.00</text:p>
          </table:table-cell>
          <table:table-cell table:style-name="ce173" office:value-type="float" office:value="11966" calcext:value-type="float">
            <text:p>11,966.00</text:p>
          </table:table-cell>
          <table:table-cell table:style-name="ce173" office:value-type="float" office:value="17867" calcext:value-type="float">
            <text:p>17,867.00</text:p>
          </table:table-cell>
          <table:table-cell table:style-name="ce173" office:value-type="float" office:value="21121" calcext:value-type="float">
            <text:p>21,121.00</text:p>
          </table:table-cell>
          <table:table-cell table:style-name="ce173" office:value-type="float" office:value="25769" calcext:value-type="float">
            <text:p>25,769.00</text:p>
          </table:table-cell>
          <table:table-cell table:style-name="ce173" office:value-type="float" office:value="22401" calcext:value-type="float">
            <text:p>22,401.00</text:p>
          </table:table-cell>
          <table:table-cell table:style-name="ce173" office:value-type="float" office:value="22752" calcext:value-type="float">
            <text:p>22,752.00</text:p>
          </table:table-cell>
          <table:table-cell table:style-name="ce173" office:value-type="float" office:value="22659" calcext:value-type="float">
            <text:p>22,659.00</text:p>
          </table:table-cell>
          <table:table-cell/>
          <table:table-cell table:style-name="ce186" office:value-type="string" calcext:value-type="string">
            <text:p>TOTAL</text:p>
          </table:table-cell>
          <table:table-cell table:style-name="ce172" table:formula="of:=+[.AB4]" office:value-type="float" office:value="13273.8" calcext:value-type="float">
            <text:p>13,273.80</text:p>
          </table:table-cell>
          <table:table-cell table:style-name="ce172" table:formula="of:=+[.AC4]" office:value-type="float" office:value="12850.8" calcext:value-type="float">
            <text:p>12,850.80</text:p>
          </table:table-cell>
          <table:table-cell table:style-name="ce172" table:formula="of:=+[.AD4]" office:value-type="float" office:value="14521.8" calcext:value-type="float">
            <text:p>14,521.80</text:p>
          </table:table-cell>
          <table:table-cell table:style-name="ce172" table:formula="of:=+[.AE4]" office:value-type="float" office:value="14356.8" calcext:value-type="float">
            <text:p>14,356.80</text:p>
          </table:table-cell>
          <table:table-cell table:style-name="ce172" table:formula="of:=+[.AF4]" office:value-type="float" office:value="15326.4" calcext:value-type="float">
            <text:p>15,326.40</text:p>
          </table:table-cell>
          <table:table-cell table:style-name="ce172" table:formula="of:=+[.AG4]" office:value-type="float" office:value="15978" calcext:value-type="float">
            <text:p>15,978.00</text:p>
          </table:table-cell>
          <table:table-cell table:style-name="ce172" table:formula="of:=+[.AH4]" office:value-type="float" office:value="14145.6" calcext:value-type="float">
            <text:p>14,145.60</text:p>
          </table:table-cell>
          <table:table-cell table:style-name="ce172" table:formula="of:=+[.AI4]" office:value-type="float" office:value="13662.6" calcext:value-type="float">
            <text:p>13,662.60</text:p>
          </table:table-cell>
          <table:table-cell table:style-name="ce189" table:number-columns-repeated="5"/>
          <table:table-cell table:number-columns-repeated="16344"/>
        </table:table-row>
        <table:table-row table:style-name="ro10">
          <table:table-cell/>
          <table:table-cell table:style-name="ce121" table:number-columns-spanned="5" table:number-rows-spanned="1"/>
          <table:covered-table-cell table:number-columns-repeated="4" table:style-name="ce121"/>
          <table:table-cell table:style-name="ce132" office:value-type="float" office:value="260" calcext:value-type="float">
            <text:p>260</text:p>
          </table:table-cell>
          <table:table-cell table:style-name="ce137"/>
          <table:table-cell table:style-name="ce132" office:value-type="float" office:value="37" calcext:value-type="float">
            <text:p>37</text:p>
          </table:table-cell>
          <table:table-cell table:style-name="ce139"/>
          <table:table-cell table:style-name="ce143" table:formula="of:=+[.I7]+[.G7]+[.J7]" office:value-type="float" office:value="297" calcext:value-type="float">
            <text:p>297</text:p>
          </table:table-cell>
          <table:table-cell table:style-name="ce148" table:formula="of:=+[.K7]*0.8*0.35" office:value-type="float" office:value="83.16" calcext:value-type="float">
            <text:p>83</text:p>
          </table:table-cell>
          <table:table-cell table:style-name="ce153" table:formula="of:=+[.K7]*0.8*0.085" office:value-type="float" office:value="20.196" calcext:value-type="float">
            <text:p>20.20</text:p>
          </table:table-cell>
          <table:table-cell table:style-name="ce155"/>
          <table:table-cell table:number-columns-repeated="2"/>
          <table:table-cell table:style-name="ce167" office:value-type="string" calcext:value-type="string">
            <text:p>HUANCASANCOS</text:p>
          </table:table-cell>
          <table:table-cell table:style-name="ce173" office:value-type="float" office:value="9699" calcext:value-type="float">
            <text:p>9,699.00</text:p>
          </table:table-cell>
          <table:table-cell table:style-name="ce173" office:value-type="float" office:value="8790" calcext:value-type="float">
            <text:p>8,790.00</text:p>
          </table:table-cell>
          <table:table-cell table:style-name="ce173" office:value-type="float" office:value="12207" calcext:value-type="float">
            <text:p>12,207.00</text:p>
          </table:table-cell>
          <table:table-cell table:style-name="ce173" office:value-type="float" office:value="12106" calcext:value-type="float">
            <text:p>12,106.00</text:p>
          </table:table-cell>
          <table:table-cell table:style-name="ce173" office:value-type="float" office:value="14050" calcext:value-type="float">
            <text:p>14,050.00</text:p>
          </table:table-cell>
          <table:table-cell table:style-name="ce173" office:value-type="float" office:value="14400" calcext:value-type="float">
            <text:p>14,400.00</text:p>
          </table:table-cell>
          <table:table-cell table:style-name="ce173" office:value-type="float" office:value="15462" calcext:value-type="float">
            <text:p>15,462.00</text:p>
          </table:table-cell>
          <table:table-cell table:style-name="ce173" office:value-type="float" office:value="14350" calcext:value-type="float">
            <text:p>14,350.00</text:p>
          </table:table-cell>
          <table:table-cell/>
          <table:table-cell table:style-name="ce187"/>
          <table:table-cell table:style-name="ce190" table:number-columns-repeated="8"/>
          <table:table-cell table:style-name="ce189" table:number-columns-repeated="5"/>
          <table:table-cell table:number-columns-repeated="16344"/>
        </table:table-row>
        <table:table-row table:style-name="ro14">
          <table:table-cell/>
          <table:table-cell table:style-name="ce122" office:value-type="string" calcext:value-type="string" table:number-columns-spanned="1" table:number-rows-spanned="4">
            <text:p>1º AÑO</text:p>
          </table:table-cell>
          <table:table-cell table:style-name="ce124" office:value-type="string" calcext:value-type="string">
            <text:p>I</text:p>
          </table:table-cell>
          <table:table-cell table:style-name="ce127" table:formula="of:=+[.G7]*[.G24]*(100%-[.G25])*[.G28]" office:value-type="float" office:value="380.12" calcext:value-type="float">
            <text:p>380</text:p>
          </table:table-cell>
          <table:table-cell table:style-name="ce127" table:formula="of:=+[.D8]/2" office:value-type="float" office:value="190.06" calcext:value-type="float">
            <text:p>190</text:p>
          </table:table-cell>
          <table:table-cell table:style-name="ce127" table:formula="of:=+[.E8]*(100%-14%)" office:value-type="float" office:value="163.4516" calcext:value-type="float">
            <text:p>163</text:p>
          </table:table-cell>
          <table:table-cell table:style-name="ce127" table:formula="of:=+[.G7]*(100%-[.$G$27])+[.F8]" office:value-type="float" office:value="415.6516" calcext:value-type="float">
            <text:p>416</text:p>
          </table:table-cell>
          <table:table-cell table:style-name="ce127" table:formula="of:=+[.D8]/2" office:value-type="float" office:value="190.06" calcext:value-type="float">
            <text:p>190</text:p>
          </table:table-cell>
          <table:table-cell table:style-name="ce127" table:formula="of:=[.G8]*[.I7]/[.G7]" office:value-type="float" office:value="59.15042" calcext:value-type="float">
            <text:p>59</text:p>
          </table:table-cell>
          <table:table-cell table:style-name="ce127" table:formula="of:=+[.H8]*(100%-[.$G$26])-([.I8]-[.I7])" office:value-type="float" office:value="160.30718" calcext:value-type="float">
            <text:p>160</text:p>
          </table:table-cell>
          <table:table-cell table:style-name="ce144" table:formula="of:=+[.I8]+[.G8]+[.J8]" office:value-type="float" office:value="635.1092" calcext:value-type="float">
            <text:p>635</text:p>
          </table:table-cell>
          <table:table-cell table:style-name="ce149" table:formula="of:=+[.K8]*0.8*0.35" office:value-type="float" office:value="177.830576" calcext:value-type="float">
            <text:p>178</text:p>
          </table:table-cell>
          <table:table-cell table:style-name="ce154" table:formula="of:=+[.K8]*0.8*0.085" office:value-type="float" office:value="43.1874256" calcext:value-type="float">
            <text:p>43.19</text:p>
          </table:table-cell>
          <table:table-cell table:style-name="ce156" table:formula="of:=+[.J8]*0.8" office:value-type="float" office:value="128.245744" calcext:value-type="float">
            <text:p>128.25</text:p>
          </table:table-cell>
          <table:table-cell table:number-columns-repeated="2"/>
          <table:table-cell table:style-name="ce167" office:value-type="string" calcext:value-type="string">
            <text:p>HUANTA</text:p>
          </table:table-cell>
          <table:table-cell table:style-name="ce173" office:value-type="float" office:value="112143" calcext:value-type="float">
            <text:p>112,143.00</text:p>
          </table:table-cell>
          <table:table-cell table:style-name="ce173" office:value-type="float" office:value="71789" calcext:value-type="float">
            <text:p>71,789.00</text:p>
          </table:table-cell>
          <table:table-cell table:style-name="ce173" office:value-type="float" office:value="111154" calcext:value-type="float">
            <text:p>111,154.00</text:p>
          </table:table-cell>
          <table:table-cell table:style-name="ce173" office:value-type="float" office:value="121736" calcext:value-type="float">
            <text:p>121,736.00</text:p>
          </table:table-cell>
          <table:table-cell table:style-name="ce173" office:value-type="float" office:value="117880" calcext:value-type="float">
            <text:p>117,880.00</text:p>
          </table:table-cell>
          <table:table-cell table:style-name="ce173" office:value-type="float" office:value="123664" calcext:value-type="float">
            <text:p>123,664.00</text:p>
          </table:table-cell>
          <table:table-cell table:style-name="ce173" office:value-type="float" office:value="157798" calcext:value-type="float">
            <text:p>157,798.00</text:p>
          </table:table-cell>
          <table:table-cell table:style-name="ce173" office:value-type="float" office:value="160092" calcext:value-type="float">
            <text:p>160,092.00</text:p>
          </table:table-cell>
          <table:table-cell/>
          <table:table-cell table:style-name="ce168" office:value-type="string" calcext:value-type="string" table:number-columns-spanned="3" table:number-rows-spanned="1">
            <text:p>Fuente: DIA-DRA Ayacucho 2019</text:p>
          </table:table-cell>
          <table:covered-table-cell table:number-columns-repeated="2" table:style-name="ce168"/>
          <table:table-cell table:style-name="ce190" table:number-columns-repeated="6"/>
          <table:table-cell table:style-name="ce189" table:number-columns-repeated="5"/>
          <table:table-cell table:number-columns-repeated="16344"/>
        </table:table-row>
        <table:table-row table:style-name="ro10">
          <table:table-cell/>
          <table:covered-table-cell table:style-name="ce122"/>
          <table:table-cell table:style-name="ce124" office:value-type="string" calcext:value-type="string">
            <text:p>II</text:p>
          </table:table-cell>
          <table:table-cell table:style-name="ce127" table:formula="of:=+[.G8]*85%*(100%-14%)*2" office:value-type="float" office:value="607.6826392" calcext:value-type="float">
            <text:p>608</text:p>
          </table:table-cell>
          <table:table-cell table:style-name="ce127" table:formula="of:=+[.D9]/2" office:value-type="float" office:value="303.8413196" calcext:value-type="float">
            <text:p>304</text:p>
          </table:table-cell>
          <table:table-cell table:style-name="ce127" table:formula="of:=+[.E9]*(100%-14%)" office:value-type="float" office:value="261.303534856" calcext:value-type="float">
            <text:p>261</text:p>
          </table:table-cell>
          <table:table-cell table:style-name="ce127" table:formula="of:=+[.G8]*(100%-[.$G$27])+[.F9]" office:value-type="float" office:value="664.485586856" calcext:value-type="float">
            <text:p>664</text:p>
          </table:table-cell>
          <table:table-cell table:style-name="ce127" table:formula="of:=+[.D9]/2" office:value-type="float" office:value="303.8413196" calcext:value-type="float">
            <text:p>304</text:p>
          </table:table-cell>
          <table:table-cell table:style-name="ce127" table:formula="of:=[.G9]*[.I7]/[.G7]" office:value-type="float" office:value="94.5614104372" calcext:value-type="float">
            <text:p>95</text:p>
          </table:table-cell>
          <table:table-cell table:style-name="ce127" table:formula="of:=+[.H9]*(100%-[.$G$26])-([.I9]-[.I8])" office:value-type="float" office:value="256.2766763788" calcext:value-type="float">
            <text:p>256</text:p>
          </table:table-cell>
          <table:table-cell table:style-name="ce144" table:formula="of:=+[.I9]+[.G9]+[.J9]" office:value-type="float" office:value="1015.323673672" calcext:value-type="float">
            <text:p>1015</text:p>
          </table:table-cell>
          <table:table-cell table:style-name="ce149" table:formula="of:=+[.K9]*0.8*0.35" office:value-type="float" office:value="284.29062862816" calcext:value-type="float">
            <text:p>284</text:p>
          </table:table-cell>
          <table:table-cell table:style-name="ce154" table:formula="of:=+[.K9]*0.8*0.085" office:value-type="float" office:value="69.042009809696" calcext:value-type="float">
            <text:p>69.04</text:p>
          </table:table-cell>
          <table:table-cell table:style-name="ce156" table:formula="of:=+[.J9]*0.8" office:value-type="float" office:value="205.02134110304" calcext:value-type="float">
            <text:p>205.02</text:p>
          </table:table-cell>
          <table:table-cell table:number-columns-repeated="2"/>
          <table:table-cell table:style-name="ce167" office:value-type="string" calcext:value-type="string">
            <text:p>LA MAR</text:p>
          </table:table-cell>
          <table:table-cell table:style-name="ce173" office:value-type="float" office:value="46912" calcext:value-type="float">
            <text:p>46,912.00</text:p>
          </table:table-cell>
          <table:table-cell table:style-name="ce173" office:value-type="float" office:value="34253" calcext:value-type="float">
            <text:p>34,253.00</text:p>
          </table:table-cell>
          <table:table-cell table:style-name="ce173" office:value-type="float" office:value="39086" calcext:value-type="float">
            <text:p>39,086.00</text:p>
          </table:table-cell>
          <table:table-cell table:style-name="ce173" office:value-type="float" office:value="38330" calcext:value-type="float">
            <text:p>38,330.00</text:p>
          </table:table-cell>
          <table:table-cell table:style-name="ce173" office:value-type="float" office:value="45860" calcext:value-type="float">
            <text:p>45,860.00</text:p>
          </table:table-cell>
          <table:table-cell table:style-name="ce173" office:value-type="float" office:value="49417" calcext:value-type="float">
            <text:p>49,417.00</text:p>
          </table:table-cell>
          <table:table-cell table:style-name="ce173" office:value-type="float" office:value="44243" calcext:value-type="float">
            <text:p>44,243.00</text:p>
          </table:table-cell>
          <table:table-cell table:style-name="ce173" office:value-type="float" office:value="44808" calcext:value-type="float">
            <text:p>44,808.00</text:p>
          </table:table-cell>
          <table:table-cell/>
          <table:table-cell table:style-name="ce187"/>
          <table:table-cell table:style-name="ce190" office:value-type="string" calcext:value-type="string">
            <text:p>Destino</text:p>
          </table:table-cell>
          <table:table-cell table:style-name="ce190" table:number-columns-repeated="7"/>
          <table:table-cell table:style-name="ce189" table:number-columns-repeated="5"/>
          <table:table-cell table:number-columns-repeated="16344"/>
        </table:table-row>
        <table:table-row table:style-name="ro10">
          <table:table-cell/>
          <table:covered-table-cell table:style-name="ce122"/>
          <table:table-cell table:style-name="ce124" office:value-type="string" calcext:value-type="string">
            <text:p>III</text:p>
          </table:table-cell>
          <table:table-cell table:style-name="ce127" table:formula="of:=+[.G9]*85%*(100%-14%)*2" office:value-type="float" office:value="971.477927983472" calcext:value-type="float">
            <text:p>971</text:p>
          </table:table-cell>
          <table:table-cell table:style-name="ce127" table:formula="of:=+[.D10]/2" office:value-type="float" office:value="485.738963991736" calcext:value-type="float">
            <text:p>486</text:p>
          </table:table-cell>
          <table:table-cell table:style-name="ce127" table:formula="of:=+[.E10]*(100%-14%)" office:value-type="float" office:value="417.735509032893" calcext:value-type="float">
            <text:p>418</text:p>
          </table:table-cell>
          <table:table-cell table:style-name="ce127" table:formula="of:=+[.G9]*(100%-[.$G$27])+[.F10]-((([.G9]*(100%-[.$G$27])+[.F10]))-[.$G$31])" office:value-type="float" office:value="1100" calcext:value-type="float">
            <text:p>1100</text:p>
          </table:table-cell>
          <table:table-cell table:style-name="ce127" table:formula="of:=+[.D10]/2" office:value-type="float" office:value="485.738963991736" calcext:value-type="float">
            <text:p>486</text:p>
          </table:table-cell>
          <table:table-cell table:style-name="ce127" table:formula="of:=[.G10]*[.I7]/[.G7]" office:value-type="float" office:value="156.538461538462" calcext:value-type="float">
            <text:p>157</text:p>
          </table:table-cell>
          <table:table-cell table:style-name="ce127" table:formula="of:=+[.H10]*(100%-[.$G$26])-([.I10]-[.I9])" office:value-type="float" office:value="404.332354330805" calcext:value-type="float">
            <text:p>404</text:p>
          </table:table-cell>
          <table:table-cell table:style-name="ce144" table:formula="of:=+[.I10]+[.G10]+[.J10]" office:value-type="float" office:value="1660.87081586927" calcext:value-type="float">
            <text:p>1661</text:p>
          </table:table-cell>
          <table:table-cell table:style-name="ce149" table:formula="of:=+[.K10]*0.8*0.35" office:value-type="float" office:value="465.043828443395" calcext:value-type="float">
            <text:p>465</text:p>
          </table:table-cell>
          <table:table-cell table:style-name="ce154" table:formula="of:=+[.K10]*0.8*0.085" office:value-type="float" office:value="112.93921547911" calcext:value-type="float">
            <text:p>112.94</text:p>
          </table:table-cell>
          <table:table-cell table:style-name="ce156" table:formula="of:=+[.J10]*0.8" office:value-type="float" office:value="323.465883464644" calcext:value-type="float">
            <text:p>323.47</text:p>
          </table:table-cell>
          <table:table-cell table:number-columns-repeated="2"/>
          <table:table-cell table:style-name="ce167" office:value-type="string" calcext:value-type="string">
            <text:p>LUCANAS</text:p>
          </table:table-cell>
          <table:table-cell table:style-name="ce173" office:value-type="float" office:value="22123" calcext:value-type="float">
            <text:p>22,123.00</text:p>
          </table:table-cell>
          <table:table-cell table:style-name="ce173" office:value-type="float" office:value="21418" calcext:value-type="float">
            <text:p>21,418.00</text:p>
          </table:table-cell>
          <table:table-cell table:style-name="ce173" office:value-type="float" office:value="24203" calcext:value-type="float">
            <text:p>24,203.00</text:p>
          </table:table-cell>
          <table:table-cell table:style-name="ce173" office:value-type="float" office:value="23928" calcext:value-type="float">
            <text:p>23,928.00</text:p>
          </table:table-cell>
          <table:table-cell table:style-name="ce173" office:value-type="float" office:value="25544" calcext:value-type="float">
            <text:p>25,544.00</text:p>
          </table:table-cell>
          <table:table-cell table:style-name="ce173" office:value-type="float" office:value="26630" calcext:value-type="float">
            <text:p>26,630.00</text:p>
          </table:table-cell>
          <table:table-cell table:style-name="ce173" office:value-type="float" office:value="23576" calcext:value-type="float">
            <text:p>23,576.00</text:p>
          </table:table-cell>
          <table:table-cell table:style-name="ce173" office:value-type="float" office:value="22771" calcext:value-type="float">
            <text:p>22,771.00</text:p>
          </table:table-cell>
          <table:table-cell/>
          <table:table-cell office:value-type="string" calcext:value-type="string">
            <text:p>Destino al Mercado Puquio</text:p>
          </table:table-cell>
          <table:table-cell table:style-name="ce191" office:value-type="percentage" office:value="0.6" calcext:value-type="percentage">
            <text:p>60.00 %</text:p>
          </table:table-cell>
          <table:table-cell table:style-name="ce190"/>
          <table:table-cell table:number-columns-repeated="6"/>
          <table:table-cell table:style-name="ce189" table:number-columns-repeated="5"/>
          <table:table-cell table:number-columns-repeated="16344"/>
        </table:table-row>
        <table:table-row table:style-name="ro10">
          <table:table-cell/>
          <table:covered-table-cell table:style-name="ce122"/>
          <table:table-cell table:style-name="ce124" office:value-type="string" calcext:value-type="string">
            <text:p>IV</text:p>
          </table:table-cell>
          <table:table-cell table:style-name="ce127" table:formula="of:=+[.G10]*85%*(100%-14%)*2" office:value-type="float" office:value="1608.2" calcext:value-type="float">
            <text:p>1608</text:p>
          </table:table-cell>
          <table:table-cell table:style-name="ce127" table:formula="of:=+[.D11]/2" office:value-type="float" office:value="804.1" calcext:value-type="float">
            <text:p>804</text:p>
          </table:table-cell>
          <table:table-cell table:style-name="ce127" table:formula="of:=+[.E11]*(100%-14%)" office:value-type="float" office:value="691.526" calcext:value-type="float">
            <text:p>692</text:p>
          </table:table-cell>
          <table:table-cell table:style-name="ce127" table:formula="of:=+[.G10]*(100%-[.$G$27])+[.F11]-((([.G10]*(100%-[.$G$27])+[.F11]))-[.$G$31])" office:value-type="float" office:value="1100" calcext:value-type="float">
            <text:p>1100</text:p>
          </table:table-cell>
          <table:table-cell table:style-name="ce127" table:formula="of:=+[.D11]/2" office:value-type="float" office:value="804.1" calcext:value-type="float">
            <text:p>804</text:p>
          </table:table-cell>
          <table:table-cell table:style-name="ce127" table:formula="of:=[.G11]*[.I7]/[.G7]" office:value-type="float" office:value="156.538461538462" calcext:value-type="float">
            <text:p>157</text:p>
          </table:table-cell>
          <table:table-cell table:style-name="ce127" table:formula="of:=+[.H11]*(100%-[.$G$26])-([.I11]-[.I10])" office:value-type="float" office:value="771.936" calcext:value-type="float">
            <text:p>772</text:p>
          </table:table-cell>
          <table:table-cell table:style-name="ce144" table:formula="of:=+[.I11]+[.G11]+[.J11]" office:value-type="float" office:value="2028.47446153846" calcext:value-type="float">
            <text:p>2028</text:p>
          </table:table-cell>
          <table:table-cell table:style-name="ce149" table:formula="of:=+[.K11]*0.8*0.35" office:value-type="float" office:value="567.972849230769" calcext:value-type="float">
            <text:p>568</text:p>
          </table:table-cell>
          <table:table-cell table:style-name="ce154" table:formula="of:=+[.K11]*0.8*0.085" office:value-type="float" office:value="137.936263384615" calcext:value-type="float">
            <text:p>137.94</text:p>
          </table:table-cell>
          <table:table-cell table:style-name="ce156" table:formula="of:=+[.J11]*0.8" office:value-type="float" office:value="617.5488" calcext:value-type="float">
            <text:p>617.55</text:p>
          </table:table-cell>
          <table:table-cell table:style-name="ce157" table:formula="of:=SUM([.J8:.J11])" office:value-type="float" office:value="1592.85221070961" calcext:value-type="float">
            <text:p>1593</text:p>
          </table:table-cell>
          <table:table-cell table:style-name="ce152"/>
          <table:table-cell table:style-name="ce167" office:value-type="string" calcext:value-type="string">
            <text:p>PARINACOCHAS</text:p>
          </table:table-cell>
          <table:table-cell table:style-name="ce173" office:value-type="float" office:value="24717" calcext:value-type="float">
            <text:p>24,717.00</text:p>
          </table:table-cell>
          <table:table-cell table:style-name="ce173" office:value-type="float" office:value="23415" calcext:value-type="float">
            <text:p>23,415.00</text:p>
          </table:table-cell>
          <table:table-cell table:style-name="ce173" office:value-type="float" office:value="24397" calcext:value-type="float">
            <text:p>24,397.00</text:p>
          </table:table-cell>
          <table:table-cell table:style-name="ce173" office:value-type="float" office:value="24067" calcext:value-type="float">
            <text:p>24,067.00</text:p>
          </table:table-cell>
          <table:table-cell table:style-name="ce173" office:value-type="float" office:value="22654" calcext:value-type="float">
            <text:p>22,654.00</text:p>
          </table:table-cell>
          <table:table-cell table:style-name="ce173" office:value-type="float" office:value="22388" calcext:value-type="float">
            <text:p>22,388.00</text:p>
          </table:table-cell>
          <table:table-cell table:style-name="ce173" office:value-type="float" office:value="23015" calcext:value-type="float">
            <text:p>23,015.00</text:p>
          </table:table-cell>
          <table:table-cell table:style-name="ce173" office:value-type="float" office:value="24664" calcext:value-type="float">
            <text:p>24,664.00</text:p>
          </table:table-cell>
          <table:table-cell table:number-columns-repeated="10"/>
          <table:table-cell table:style-name="ce189" table:number-columns-repeated="5"/>
          <table:table-cell table:number-columns-repeated="16344"/>
        </table:table-row>
        <table:table-row table:style-name="ro14">
          <table:table-cell/>
          <table:table-cell table:style-name="ce122" office:value-type="string" calcext:value-type="string" table:number-columns-spanned="1" table:number-rows-spanned="4">
            <text:p>2º AÑO</text:p>
          </table:table-cell>
          <table:table-cell table:style-name="ce124" office:value-type="string" calcext:value-type="string">
            <text:p>I</text:p>
          </table:table-cell>
          <table:table-cell table:style-name="ce127" table:formula="of:=+[.G11]*85%*(100%-14%)*2" office:value-type="float" office:value="1608.2" calcext:value-type="float">
            <text:p>1608</text:p>
          </table:table-cell>
          <table:table-cell table:style-name="ce127" table:formula="of:=+[.D12]/2" office:value-type="float" office:value="804.1" calcext:value-type="float">
            <text:p>804</text:p>
          </table:table-cell>
          <table:table-cell table:style-name="ce127" table:formula="of:=+[.E12]*(100%-14%)" office:value-type="float" office:value="691.526" calcext:value-type="float">
            <text:p>692</text:p>
          </table:table-cell>
          <table:table-cell table:style-name="ce127" table:formula="of:=+[.G11]*(100%-[.$G$27])+[.F12]-((([.G11]*(100%-[.$G$27])+[.F12]))-[.$G$31])" office:value-type="float" office:value="1100" calcext:value-type="float">
            <text:p>1100</text:p>
          </table:table-cell>
          <table:table-cell table:style-name="ce127" table:formula="of:=+[.D12]/2" office:value-type="float" office:value="804.1" calcext:value-type="float">
            <text:p>804</text:p>
          </table:table-cell>
          <table:table-cell table:style-name="ce127" table:formula="of:=[.G12]*[.I7]/[.G7]" office:value-type="float" office:value="156.538461538462" calcext:value-type="float">
            <text:p>157</text:p>
          </table:table-cell>
          <table:table-cell table:style-name="ce127" table:formula="of:=+[.H12]*(100%-[.$G$26])-([.I12]-[.I11])+((([.G11]*(100%-[.$G$27])+[.F12])-[.$G$31]))" office:value-type="float" office:value="1430.462" calcext:value-type="float">
            <text:p>1430</text:p>
          </table:table-cell>
          <table:table-cell table:style-name="ce144" table:formula="of:=+[.I12]+[.G12]+[.J12]" office:value-type="float" office:value="2687.00046153846" calcext:value-type="float">
            <text:p>2687</text:p>
          </table:table-cell>
          <table:table-cell table:style-name="ce149" table:formula="of:=+[.K12]*0.8*0.35" office:value-type="float" office:value="752.360129230769" calcext:value-type="float">
            <text:p>752</text:p>
          </table:table-cell>
          <table:table-cell table:style-name="ce154" table:formula="of:=+[.K12]*0.8*0.085" office:value-type="float" office:value="182.716031384615" calcext:value-type="float">
            <text:p>182.72</text:p>
          </table:table-cell>
          <table:table-cell table:style-name="ce156" table:formula="of:=+[.J12]*0.8" office:value-type="float" office:value="1144.3696" calcext:value-type="float">
            <text:p>1144.37</text:p>
          </table:table-cell>
          <table:table-cell table:style-name="ce158"/>
          <table:table-cell/>
          <table:table-cell table:style-name="ce167" office:value-type="string" calcext:value-type="string">
            <text:p>PAUCAR DEL SARA SARA</text:p>
          </table:table-cell>
          <table:table-cell table:style-name="ce173" office:value-type="float" office:value="45156" calcext:value-type="float">
            <text:p>45,156.00</text:p>
          </table:table-cell>
          <table:table-cell table:style-name="ce173" office:value-type="float" office:value="24055" calcext:value-type="float">
            <text:p>24,055.00</text:p>
          </table:table-cell>
          <table:table-cell table:style-name="ce173" office:value-type="float" office:value="32136" calcext:value-type="float">
            <text:p>32,136.00</text:p>
          </table:table-cell>
          <table:table-cell table:style-name="ce173" office:value-type="float" office:value="30286" calcext:value-type="float">
            <text:p>30,286.00</text:p>
          </table:table-cell>
          <table:table-cell table:style-name="ce173" office:value-type="float" office:value="30465" calcext:value-type="float">
            <text:p>30,465.00</text:p>
          </table:table-cell>
          <table:table-cell table:style-name="ce173" office:value-type="float" office:value="29863" calcext:value-type="float">
            <text:p>29,863.00</text:p>
          </table:table-cell>
          <table:table-cell table:style-name="ce173" office:value-type="float" office:value="30155" calcext:value-type="float">
            <text:p>30,155.00</text:p>
          </table:table-cell>
          <table:table-cell table:style-name="ce173" office:value-type="float" office:value="28452" calcext:value-type="float">
            <text:p>28,452.00</text:p>
          </table:table-cell>
          <table:table-cell table:number-columns-repeated="4"/>
          <table:table-cell table:style-name="ce190" table:number-columns-repeated="6"/>
          <table:table-cell table:style-name="ce189" table:number-columns-repeated="5"/>
          <table:table-cell table:number-columns-repeated="16344"/>
        </table:table-row>
        <table:table-row table:style-name="ro10">
          <table:table-cell/>
          <table:covered-table-cell table:style-name="ce122"/>
          <table:table-cell table:style-name="ce124" office:value-type="string" calcext:value-type="string">
            <text:p>II</text:p>
          </table:table-cell>
          <table:table-cell table:style-name="ce127" table:formula="of:=+[.G12]*85%*(100%-14%)*2" office:value-type="float" office:value="1608.2" calcext:value-type="float">
            <text:p>1608</text:p>
          </table:table-cell>
          <table:table-cell table:style-name="ce127" table:formula="of:=+[.D13]/2" office:value-type="float" office:value="804.1" calcext:value-type="float">
            <text:p>804</text:p>
          </table:table-cell>
          <table:table-cell table:style-name="ce127" table:formula="of:=+[.E13]*(100%-14%)" office:value-type="float" office:value="691.526" calcext:value-type="float">
            <text:p>692</text:p>
          </table:table-cell>
          <table:table-cell table:style-name="ce127" table:formula="of:=+[.G12]*(100%-[.$G$27])+[.F13]-((([.G12]*(100%-[.$G$27])+[.F13]))-[.$G$31])" office:value-type="float" office:value="1100" calcext:value-type="float">
            <text:p>1100</text:p>
          </table:table-cell>
          <table:table-cell table:style-name="ce127" table:formula="of:=+[.D13]/2" office:value-type="float" office:value="804.1" calcext:value-type="float">
            <text:p>804</text:p>
          </table:table-cell>
          <table:table-cell table:style-name="ce127" table:formula="of:=[.G13]*[.I7]/[.G7]" office:value-type="float" office:value="156.538461538462" calcext:value-type="float">
            <text:p>157</text:p>
          </table:table-cell>
          <table:table-cell table:style-name="ce127" table:formula="of:=+[.H13]*(100%-[.$G$26])-([.I13]-[.I12])+((([.G12]*(100%-[.$G$27])+[.F13])-[.$G$31]))" office:value-type="float" office:value="1430.462" calcext:value-type="float">
            <text:p>1430</text:p>
          </table:table-cell>
          <table:table-cell table:style-name="ce144" table:formula="of:=+[.I13]+[.G13]+[.J13]" office:value-type="float" office:value="2687.00046153846" calcext:value-type="float">
            <text:p>2687</text:p>
          </table:table-cell>
          <table:table-cell table:style-name="ce149" table:formula="of:=+[.K13]*0.8*0.35" office:value-type="float" office:value="752.360129230769" calcext:value-type="float">
            <text:p>752</text:p>
          </table:table-cell>
          <table:table-cell table:style-name="ce154" table:formula="of:=+[.K13]*0.8*0.085" office:value-type="float" office:value="182.716031384615" calcext:value-type="float">
            <text:p>182.72</text:p>
          </table:table-cell>
          <table:table-cell table:style-name="ce156" table:formula="of:=+[.J13]*0.8" office:value-type="float" office:value="1144.3696" calcext:value-type="float">
            <text:p>1144.37</text:p>
          </table:table-cell>
          <table:table-cell table:style-name="ce158"/>
          <table:table-cell/>
          <table:table-cell table:style-name="ce167" office:value-type="string" calcext:value-type="string">
            <text:p>SUCRE</text:p>
          </table:table-cell>
          <table:table-cell table:style-name="ce173" office:value-type="float" office:value="5105" calcext:value-type="float">
            <text:p>5,105.00</text:p>
          </table:table-cell>
          <table:table-cell table:style-name="ce173" office:value-type="float" office:value="6093" calcext:value-type="float">
            <text:p>6,093.00</text:p>
          </table:table-cell>
          <table:table-cell table:style-name="ce173" office:value-type="float" office:value="7164" calcext:value-type="float">
            <text:p>7,164.00</text:p>
          </table:table-cell>
          <table:table-cell table:style-name="ce173" office:value-type="float" office:value="6884" calcext:value-type="float">
            <text:p>6,884.00</text:p>
          </table:table-cell>
          <table:table-cell table:style-name="ce173" office:value-type="float" office:value="5556" calcext:value-type="float">
            <text:p>5,556.00</text:p>
          </table:table-cell>
          <table:table-cell table:style-name="ce173" office:value-type="float" office:value="5912" calcext:value-type="float">
            <text:p>5,912.00</text:p>
          </table:table-cell>
          <table:table-cell table:style-name="ce173" office:value-type="float" office:value="6807" calcext:value-type="float">
            <text:p>6,807.00</text:p>
          </table:table-cell>
          <table:table-cell table:style-name="ce173" office:value-type="float" office:value="7155" calcext:value-type="float">
            <text:p>7,155.00</text:p>
          </table:table-cell>
          <table:table-cell table:number-columns-repeated="4"/>
          <table:table-cell table:style-name="ce190" table:number-columns-repeated="6"/>
          <table:table-cell table:style-name="ce189" table:number-columns-repeated="5"/>
          <table:table-cell table:number-columns-repeated="16344"/>
        </table:table-row>
        <table:table-row table:style-name="ro10">
          <table:table-cell/>
          <table:covered-table-cell table:style-name="ce122"/>
          <table:table-cell table:style-name="ce124" office:value-type="string" calcext:value-type="string">
            <text:p>III</text:p>
          </table:table-cell>
          <table:table-cell table:style-name="ce127" table:formula="of:=+[.G13]*85%*(100%-14%)*2" office:value-type="float" office:value="1608.2" calcext:value-type="float">
            <text:p>1608</text:p>
          </table:table-cell>
          <table:table-cell table:style-name="ce127" table:formula="of:=+[.D14]/2" office:value-type="float" office:value="804.1" calcext:value-type="float">
            <text:p>804</text:p>
          </table:table-cell>
          <table:table-cell table:style-name="ce127" table:formula="of:=+[.E14]*(100%-14%)" office:value-type="float" office:value="691.526" calcext:value-type="float">
            <text:p>692</text:p>
          </table:table-cell>
          <table:table-cell table:style-name="ce127" table:formula="of:=+[.G13]*(100%-[.$G$27])+[.F14]-((([.G13]*(100%-[.$G$27])+[.F14])-[.$G$31]))" office:value-type="float" office:value="1100" calcext:value-type="float">
            <text:p>1100</text:p>
          </table:table-cell>
          <table:table-cell table:style-name="ce127" table:formula="of:=+[.D14]/2" office:value-type="float" office:value="804.1" calcext:value-type="float">
            <text:p>804</text:p>
          </table:table-cell>
          <table:table-cell table:style-name="ce127" table:formula="of:=[.G14]*[.I7]/[.G7]" office:value-type="float" office:value="156.538461538462" calcext:value-type="float">
            <text:p>157</text:p>
          </table:table-cell>
          <table:table-cell table:style-name="ce127" table:formula="of:=+[.H14]*(100%-[.$G$26])-([.I14]-[.I13])+((([.G13]*(100%-[.$G$27])+[.F14])-[.$G$31]))" office:value-type="float" office:value="1430.462" calcext:value-type="float">
            <text:p>1430</text:p>
          </table:table-cell>
          <table:table-cell table:style-name="ce144" table:formula="of:=+[.I14]+[.G14]+[.J14]" office:value-type="float" office:value="2687.00046153846" calcext:value-type="float">
            <text:p>2687</text:p>
          </table:table-cell>
          <table:table-cell table:style-name="ce149" table:formula="of:=+[.K14]*0.8*0.35" office:value-type="float" office:value="752.360129230769" calcext:value-type="float">
            <text:p>752</text:p>
          </table:table-cell>
          <table:table-cell table:style-name="ce154" table:formula="of:=+[.K14]*0.8*0.085" office:value-type="float" office:value="182.716031384615" calcext:value-type="float">
            <text:p>182.72</text:p>
          </table:table-cell>
          <table:table-cell table:style-name="ce156" table:formula="of:=+[.J14]*0.8" office:value-type="float" office:value="1144.3696" calcext:value-type="float">
            <text:p>1144.37</text:p>
          </table:table-cell>
          <table:table-cell table:style-name="ce158"/>
          <table:table-cell/>
          <table:table-cell table:style-name="ce167" office:value-type="string" calcext:value-type="string">
            <text:p>VICTOR FAJARDO</text:p>
          </table:table-cell>
          <table:table-cell table:style-name="ce173" office:value-type="float" office:value="25045" calcext:value-type="float">
            <text:p>25,045.00</text:p>
          </table:table-cell>
          <table:table-cell table:style-name="ce173" office:value-type="float" office:value="24284" calcext:value-type="float">
            <text:p>24,284.00</text:p>
          </table:table-cell>
          <table:table-cell table:style-name="ce173" office:value-type="float" office:value="22041" calcext:value-type="float">
            <text:p>22,041.00</text:p>
          </table:table-cell>
          <table:table-cell table:style-name="ce173" office:value-type="float" office:value="18050" calcext:value-type="float">
            <text:p>18,050.00</text:p>
          </table:table-cell>
          <table:table-cell table:style-name="ce173" office:value-type="float" office:value="21848" calcext:value-type="float">
            <text:p>21,848.00</text:p>
          </table:table-cell>
          <table:table-cell table:style-name="ce173" office:value-type="float" office:value="22714" calcext:value-type="float">
            <text:p>22,714.00</text:p>
          </table:table-cell>
          <table:table-cell table:style-name="ce173" office:value-type="float" office:value="24332" calcext:value-type="float">
            <text:p>24,332.00</text:p>
          </table:table-cell>
          <table:table-cell table:style-name="ce173" office:value-type="float" office:value="25134" calcext:value-type="float">
            <text:p>25,134.00</text:p>
          </table:table-cell>
          <table:table-cell table:number-columns-repeated="4"/>
          <table:table-cell table:style-name="ce190" table:number-columns-repeated="6"/>
          <table:table-cell table:style-name="ce189" table:number-columns-repeated="5"/>
          <table:table-cell table:number-columns-repeated="16344"/>
        </table:table-row>
        <table:table-row table:style-name="ro10">
          <table:table-cell/>
          <table:covered-table-cell table:style-name="ce122"/>
          <table:table-cell table:style-name="ce124" office:value-type="string" calcext:value-type="string">
            <text:p>IV</text:p>
          </table:table-cell>
          <table:table-cell table:style-name="ce127" table:formula="of:=+[.G14]*85%*(100%-14%)*2" office:value-type="float" office:value="1608.2" calcext:value-type="float">
            <text:p>1608</text:p>
          </table:table-cell>
          <table:table-cell table:style-name="ce127" table:formula="of:=+[.D15]/2" office:value-type="float" office:value="804.1" calcext:value-type="float">
            <text:p>804</text:p>
          </table:table-cell>
          <table:table-cell table:style-name="ce127" table:formula="of:=+[.E15]*(100%-14%)" office:value-type="float" office:value="691.526" calcext:value-type="float">
            <text:p>692</text:p>
          </table:table-cell>
          <table:table-cell table:style-name="ce127" table:formula="of:=+[.G14]*(100%-[.$G$27])+[.F15]-((([.G14]*(100%-[.$G$27])+[.F15])-[.$G$31]))" office:value-type="float" office:value="1100" calcext:value-type="float">
            <text:p>1100</text:p>
          </table:table-cell>
          <table:table-cell table:style-name="ce127" table:formula="of:=+[.D15]/2" office:value-type="float" office:value="804.1" calcext:value-type="float">
            <text:p>804</text:p>
          </table:table-cell>
          <table:table-cell table:style-name="ce127" table:formula="of:=[.G15]*[.I7]/[.G7]" office:value-type="float" office:value="156.538461538462" calcext:value-type="float">
            <text:p>157</text:p>
          </table:table-cell>
          <table:table-cell table:style-name="ce127" table:formula="of:=+[.H15]*(100%-[.$G$26])-([.I15]-[.I14])+((([.G14]*(100%-[.$G$27])+[.F15])-[.$G$31]))" office:value-type="float" office:value="1430.462" calcext:value-type="float">
            <text:p>1430</text:p>
          </table:table-cell>
          <table:table-cell table:style-name="ce144" table:formula="of:=+[.I15]+[.G15]+[.J15]" office:value-type="float" office:value="2687.00046153846" calcext:value-type="float">
            <text:p>2687</text:p>
          </table:table-cell>
          <table:table-cell table:style-name="ce149" table:formula="of:=+[.K15]*0.8*0.35" office:value-type="float" office:value="752.360129230769" calcext:value-type="float">
            <text:p>752</text:p>
          </table:table-cell>
          <table:table-cell table:style-name="ce154" table:formula="of:=+[.K15]*0.8*0.085" office:value-type="float" office:value="182.716031384615" calcext:value-type="float">
            <text:p>182.72</text:p>
          </table:table-cell>
          <table:table-cell table:style-name="ce156" table:formula="of:=+[.J15]*0.8" office:value-type="float" office:value="1144.3696" calcext:value-type="float">
            <text:p>1144.37</text:p>
          </table:table-cell>
          <table:table-cell table:style-name="ce157" table:formula="of:=SUM([.J12:.J15])" office:value-type="float" office:value="5721.848" calcext:value-type="float">
            <text:p>5722</text:p>
          </table:table-cell>
          <table:table-cell/>
          <table:table-cell table:style-name="ce167" office:value-type="string" calcext:value-type="string">
            <text:p>VILCASHUAMAN</text:p>
          </table:table-cell>
          <table:table-cell table:style-name="ce173" office:value-type="float" office:value="13814" calcext:value-type="float">
            <text:p>13,814.00</text:p>
          </table:table-cell>
          <table:table-cell table:style-name="ce173" office:value-type="float" office:value="22773" calcext:value-type="float">
            <text:p>22,773.00</text:p>
          </table:table-cell>
          <table:table-cell table:style-name="ce173" office:value-type="float" office:value="17159" calcext:value-type="float">
            <text:p>17,159.00</text:p>
          </table:table-cell>
          <table:table-cell table:style-name="ce173" office:value-type="float" office:value="18330" calcext:value-type="float">
            <text:p>18,330.00</text:p>
          </table:table-cell>
          <table:table-cell table:style-name="ce173" office:value-type="float" office:value="18702" calcext:value-type="float">
            <text:p>18,702.00</text:p>
          </table:table-cell>
          <table:table-cell table:style-name="ce173" office:value-type="float" office:value="19530" calcext:value-type="float">
            <text:p>19,530.00</text:p>
          </table:table-cell>
          <table:table-cell table:style-name="ce173" office:value-type="float" office:value="18846" calcext:value-type="float">
            <text:p>18,846.00</text:p>
          </table:table-cell>
          <table:table-cell table:style-name="ce173" office:value-type="float" office:value="19382" calcext:value-type="float">
            <text:p>19,382.00</text:p>
          </table:table-cell>
          <table:table-cell table:number-columns-repeated="2"/>
          <table:table-cell table:style-name="ce191"/>
          <table:table-cell table:number-columns-repeated="7"/>
          <table:table-cell table:style-name="ce189" table:number-columns-repeated="5"/>
          <table:table-cell table:number-columns-repeated="16344"/>
        </table:table-row>
        <table:table-row table:style-name="ro10">
          <table:table-cell/>
          <table:table-cell table:style-name="ce122" office:value-type="string" calcext:value-type="string" table:number-columns-spanned="1" table:number-rows-spanned="4">
            <text:p>3º AÑO</text:p>
          </table:table-cell>
          <table:table-cell table:style-name="ce124" office:value-type="string" calcext:value-type="string">
            <text:p>I</text:p>
          </table:table-cell>
          <table:table-cell table:style-name="ce127" table:formula="of:=+[.G15]*85%*(100%-14%)*2" office:value-type="float" office:value="1608.2" calcext:value-type="float">
            <text:p>1608</text:p>
          </table:table-cell>
          <table:table-cell table:style-name="ce127" table:formula="of:=+[.D16]/2" office:value-type="float" office:value="804.1" calcext:value-type="float">
            <text:p>804</text:p>
          </table:table-cell>
          <table:table-cell table:style-name="ce127" table:formula="of:=+[.E16]*(100%-14%)" office:value-type="float" office:value="691.526" calcext:value-type="float">
            <text:p>692</text:p>
          </table:table-cell>
          <table:table-cell table:style-name="ce127" table:formula="of:=+[.G15]*(100%-[.$G$27])+[.F16]-((([.G15]*(100%-[.$G$27])+[.F16])-[.$G$31]))" office:value-type="float" office:value="1100" calcext:value-type="float">
            <text:p>1100</text:p>
          </table:table-cell>
          <table:table-cell table:style-name="ce127" table:formula="of:=+[.D16]/2" office:value-type="float" office:value="804.1" calcext:value-type="float">
            <text:p>804</text:p>
          </table:table-cell>
          <table:table-cell table:style-name="ce127" table:formula="of:=[.G16]*[.I7]/[.G7]" office:value-type="float" office:value="156.538461538462" calcext:value-type="float">
            <text:p>157</text:p>
          </table:table-cell>
          <table:table-cell table:style-name="ce127" table:formula="of:=+[.H16]*(100%-[.$G$26])-([.I16]-[.I15])+((([.G15]*(100%-[.$G$27])+[.F16])-[.$G$31]))" office:value-type="float" office:value="1430.462" calcext:value-type="float">
            <text:p>1430</text:p>
          </table:table-cell>
          <table:table-cell table:style-name="ce144" table:formula="of:=+[.I16]+[.G16]+[.J16]" office:value-type="float" office:value="2687.00046153846" calcext:value-type="float">
            <text:p>2687</text:p>
          </table:table-cell>
          <table:table-cell table:style-name="ce149" table:formula="of:=+[.K16]*0.8*0.35" office:value-type="float" office:value="752.360129230769" calcext:value-type="float">
            <text:p>752</text:p>
          </table:table-cell>
          <table:table-cell table:style-name="ce154" table:formula="of:=+[.K16]*0.8*0.085" office:value-type="float" office:value="182.716031384615" calcext:value-type="float">
            <text:p>182.72</text:p>
          </table:table-cell>
          <table:table-cell table:style-name="ce156" table:formula="of:=+[.J16]*0.8" office:value-type="float" office:value="1144.3696" calcext:value-type="float">
            <text:p>1144.37</text:p>
          </table:table-cell>
          <table:table-cell table:style-name="ce158"/>
          <table:table-cell/>
          <table:table-cell table:style-name="ce168" office:value-type="string" calcext:value-type="string" table:number-columns-spanned="3" table:number-rows-spanned="1">
            <text:p>Fuente: DIA-DRA Ayacucho 2019</text:p>
          </table:table-cell>
          <table:covered-table-cell table:number-columns-repeated="2" table:style-name="ce168"/>
          <table:table-cell table:style-name="ce177" table:number-columns-spanned="6" table:number-rows-spanned="1"/>
          <table:covered-table-cell table:number-columns-repeated="5" table:style-name="ce178"/>
          <table:table-cell table:number-columns-repeated="2"/>
          <table:table-cell table:style-name="ce191"/>
          <table:table-cell/>
          <table:table-cell table:style-name="ce177" table:number-columns-spanned="6" table:number-rows-spanned="1"/>
          <table:covered-table-cell table:number-columns-repeated="5" table:style-name="ce178"/>
          <table:table-cell table:style-name="ce189" table:number-columns-repeated="5"/>
          <table:table-cell table:number-columns-repeated="16344"/>
        </table:table-row>
        <table:table-row table:style-name="ro22">
          <table:table-cell/>
          <table:covered-table-cell table:style-name="ce122"/>
          <table:table-cell table:style-name="ce124" office:value-type="string" calcext:value-type="string">
            <text:p>II</text:p>
          </table:table-cell>
          <table:table-cell table:style-name="ce127" table:formula="of:=+[.G16]*85%*(100%-14%)*2" office:value-type="float" office:value="1608.2" calcext:value-type="float">
            <text:p>1608</text:p>
          </table:table-cell>
          <table:table-cell table:style-name="ce127" table:formula="of:=+[.D17]/2" office:value-type="float" office:value="804.1" calcext:value-type="float">
            <text:p>804</text:p>
          </table:table-cell>
          <table:table-cell table:style-name="ce127" table:formula="of:=+[.E17]*(100%-14%)" office:value-type="float" office:value="691.526" calcext:value-type="float">
            <text:p>692</text:p>
          </table:table-cell>
          <table:table-cell table:style-name="ce127" table:formula="of:=+[.G16]*(100%-[.$G$27])+[.F17]-((([.G16]*(100%-[.$G$27])+[.F17])-[.$G$31]))" office:value-type="float" office:value="1100" calcext:value-type="float">
            <text:p>1100</text:p>
          </table:table-cell>
          <table:table-cell table:style-name="ce127" table:formula="of:=+[.D17]/2" office:value-type="float" office:value="804.1" calcext:value-type="float">
            <text:p>804</text:p>
          </table:table-cell>
          <table:table-cell table:style-name="ce127" table:formula="of:=[.G17]*[.I7]/[.G7]" office:value-type="float" office:value="156.538461538462" calcext:value-type="float">
            <text:p>157</text:p>
          </table:table-cell>
          <table:table-cell table:style-name="ce127" table:formula="of:=+[.H17]*(100%-[.$G$26])-([.I17]-[.I16])+((([.G16]*(100%-[.$G$27])+[.F17])-[.$G$31]))" office:value-type="float" office:value="1430.462" calcext:value-type="float">
            <text:p>1430</text:p>
          </table:table-cell>
          <table:table-cell table:style-name="ce144" table:formula="of:=+[.I17]+[.G17]+[.J17]" office:value-type="float" office:value="2687.00046153846" calcext:value-type="float">
            <text:p>2687</text:p>
          </table:table-cell>
          <table:table-cell table:style-name="ce149" table:formula="of:=+[.K17]*0.8*0.35" office:value-type="float" office:value="752.360129230769" calcext:value-type="float">
            <text:p>752</text:p>
          </table:table-cell>
          <table:table-cell table:style-name="ce154" table:formula="of:=+[.K17]*0.8*0.085" office:value-type="float" office:value="182.716031384615" calcext:value-type="float">
            <text:p>182.72</text:p>
          </table:table-cell>
          <table:table-cell table:style-name="ce156" table:formula="of:=+[.J17]*0.8" office:value-type="float" office:value="1144.3696" calcext:value-type="float">
            <text:p>1144.37</text:p>
          </table:table-cell>
          <table:table-cell table:style-name="ce158"/>
          <table:table-cell table:number-columns-repeated="12"/>
          <table:table-cell table:style-name="ce191"/>
          <table:table-cell table:number-columns-repeated="2"/>
          <table:table-cell table:style-name="ce200" table:number-columns-repeated="5"/>
          <table:table-cell table:style-name="ce198"/>
          <table:table-cell table:style-name="ce189" table:number-columns-repeated="4"/>
          <table:table-cell table:number-columns-repeated="16344"/>
        </table:table-row>
        <table:table-row table:style-name="ro2">
          <table:table-cell/>
          <table:covered-table-cell table:style-name="ce122"/>
          <table:table-cell table:style-name="ce124" office:value-type="string" calcext:value-type="string">
            <text:p>III</text:p>
          </table:table-cell>
          <table:table-cell table:style-name="ce127" table:formula="of:=+[.G17]*85%*(100%-14%)*2" office:value-type="float" office:value="1608.2" calcext:value-type="float">
            <text:p>1608</text:p>
          </table:table-cell>
          <table:table-cell table:style-name="ce127" table:formula="of:=+[.D18]/2" office:value-type="float" office:value="804.1" calcext:value-type="float">
            <text:p>804</text:p>
          </table:table-cell>
          <table:table-cell table:style-name="ce127" table:formula="of:=+[.E18]*(100%-14%)" office:value-type="float" office:value="691.526" calcext:value-type="float">
            <text:p>692</text:p>
          </table:table-cell>
          <table:table-cell table:style-name="ce127" table:formula="of:=+[.G17]*(100%-[.$G$27])+[.F18]-((([.G17]*(100%-[.$G$27])+[.F18])-[.$G$31]))" office:value-type="float" office:value="1100" calcext:value-type="float">
            <text:p>1100</text:p>
          </table:table-cell>
          <table:table-cell table:style-name="ce127" table:formula="of:=+[.D18]/2" office:value-type="float" office:value="804.1" calcext:value-type="float">
            <text:p>804</text:p>
          </table:table-cell>
          <table:table-cell table:style-name="ce127" table:formula="of:=[.G18]*[.I7]/[.G7]" office:value-type="float" office:value="156.538461538462" calcext:value-type="float">
            <text:p>157</text:p>
          </table:table-cell>
          <table:table-cell table:style-name="ce127" table:formula="of:=+[.H18]*(100%-[.$G$26])-([.I18]-[.I17])+((([.G17]*(100%-[.$G$27])+[.F18])-[.$G$31]))" office:value-type="float" office:value="1430.462" calcext:value-type="float">
            <text:p>1430</text:p>
          </table:table-cell>
          <table:table-cell table:style-name="ce144" table:formula="of:=+[.I18]+[.G18]+[.J18]" office:value-type="float" office:value="2687.00046153846" calcext:value-type="float">
            <text:p>2687</text:p>
          </table:table-cell>
          <table:table-cell table:style-name="ce149" table:formula="of:=+[.K18]*0.8*0.35" office:value-type="float" office:value="752.360129230769" calcext:value-type="float">
            <text:p>752</text:p>
          </table:table-cell>
          <table:table-cell table:style-name="ce154" table:formula="of:=+[.K18]*0.8*0.085" office:value-type="float" office:value="182.716031384615" calcext:value-type="float">
            <text:p>182.72</text:p>
          </table:table-cell>
          <table:table-cell table:style-name="ce156" table:formula="of:=+[.J18]*0.8" office:value-type="float" office:value="1144.3696" calcext:value-type="float">
            <text:p>1144.37</text:p>
          </table:table-cell>
          <table:table-cell table:style-name="ce158"/>
          <table:table-cell table:number-columns-repeated="12"/>
          <table:table-cell table:style-name="ce191"/>
          <table:table-cell table:number-columns-repeated="3"/>
          <table:table-cell table:style-name="ce197"/>
          <table:table-cell table:style-name="ce195"/>
          <table:table-cell table:style-name="ce206"/>
          <table:table-cell table:style-name="ce197"/>
          <table:table-cell table:style-name="ce195"/>
          <table:table-cell table:style-name="ce189"/>
          <table:table-cell table:number-columns-repeated="16347"/>
        </table:table-row>
        <table:table-row table:style-name="ro2">
          <table:table-cell/>
          <table:covered-table-cell table:style-name="ce122"/>
          <table:table-cell table:style-name="ce124" office:value-type="string" calcext:value-type="string">
            <text:p>IV</text:p>
          </table:table-cell>
          <table:table-cell table:style-name="ce127" table:formula="of:=+[.G18]*85%*(100%-14%)*2" office:value-type="float" office:value="1608.2" calcext:value-type="float">
            <text:p>1608</text:p>
          </table:table-cell>
          <table:table-cell table:style-name="ce127" table:formula="of:=+[.D19]/2" office:value-type="float" office:value="804.1" calcext:value-type="float">
            <text:p>804</text:p>
          </table:table-cell>
          <table:table-cell table:style-name="ce127" table:formula="of:=+[.E19]*(100%-14%)" office:value-type="float" office:value="691.526" calcext:value-type="float">
            <text:p>692</text:p>
          </table:table-cell>
          <table:table-cell table:style-name="ce127" table:formula="of:=+[.G18]*(100%-[.$G$27])+[.F19]-((([.G18]*(100%-[.$G$27])+[.F19])-[.$G$31]))" office:value-type="float" office:value="1100" calcext:value-type="float">
            <text:p>1100</text:p>
          </table:table-cell>
          <table:table-cell table:style-name="ce127" table:formula="of:=+[.D19]/2" office:value-type="float" office:value="804.1" calcext:value-type="float">
            <text:p>804</text:p>
          </table:table-cell>
          <table:table-cell table:style-name="ce127" table:formula="of:=[.G19]*[.I7]/[.G7]" office:value-type="float" office:value="156.538461538462" calcext:value-type="float">
            <text:p>157</text:p>
          </table:table-cell>
          <table:table-cell table:style-name="ce127" table:formula="of:=+[.H19]*(100%-[.$G$26])-([.I19]-[.I18])+((([.G18]*(100%-[.$G$27])+[.F19])-[.$G$31]))" office:value-type="float" office:value="1430.462" calcext:value-type="float">
            <text:p>1430</text:p>
          </table:table-cell>
          <table:table-cell table:style-name="ce144" table:formula="of:=+[.I19]+[.G19]+[.J19]" office:value-type="float" office:value="2687.00046153846" calcext:value-type="float">
            <text:p>2687</text:p>
          </table:table-cell>
          <table:table-cell table:style-name="ce149" table:formula="of:=+[.K19]*0.8*0.35" office:value-type="float" office:value="752.360129230769" calcext:value-type="float">
            <text:p>752</text:p>
          </table:table-cell>
          <table:table-cell table:style-name="ce154" table:formula="of:=+[.K19]*0.8*0.085" office:value-type="float" office:value="182.716031384615" calcext:value-type="float">
            <text:p>182.72</text:p>
          </table:table-cell>
          <table:table-cell table:style-name="ce156" table:formula="of:=+[.J19]*0.8" office:value-type="float" office:value="1144.3696" calcext:value-type="float">
            <text:p>1144.37</text:p>
          </table:table-cell>
          <table:table-cell table:style-name="ce157" table:formula="of:=SUM([.J16:.J19])" office:value-type="float" office:value="5721.848" calcext:value-type="float">
            <text:p>5722</text:p>
          </table:table-cell>
          <table:table-cell table:number-columns-repeated="12"/>
          <table:table-cell table:style-name="ce191"/>
          <table:table-cell table:number-columns-repeated="3"/>
          <table:table-cell table:style-name="ce201"/>
          <table:table-cell table:style-name="ce196"/>
          <table:table-cell table:style-name="ce198"/>
          <table:table-cell table:style-name="ce207"/>
          <table:table-cell table:style-name="ce211"/>
          <table:table-cell table:style-name="ce189"/>
          <table:table-cell table:number-columns-repeated="16347"/>
        </table:table-row>
        <table:table-row table:style-name="ro2">
          <table:table-cell table:number-columns-repeated="2"/>
          <table:table-cell table:style-name="ce123" table:number-columns-repeated="8"/>
          <table:table-cell/>
          <table:table-cell table:style-name="ce150" table:formula="of:=+[.N19]*0.8*0.35" office:value-type="float" office:value="320.423488" calcext:value-type="float">
            <text:p>320.423488</text:p>
          </table:table-cell>
          <table:table-cell table:style-name="ce150" table:formula="of:=+[.N19]*0.085" office:value-type="float" office:value="97.271416" calcext:value-type="float">
            <text:p>97.271416</text:p>
          </table:table-cell>
          <table:table-cell table:number-columns-repeated="18"/>
          <table:table-cell table:style-name="ce201"/>
          <table:table-cell table:style-name="ce196"/>
          <table:table-cell table:style-name="ce198"/>
          <table:table-cell table:style-name="ce207"/>
          <table:table-cell table:style-name="ce211"/>
          <table:table-cell table:style-name="ce189"/>
          <table:table-cell table:number-columns-repeated="16347"/>
        </table:table-row>
        <table:table-row table:style-name="ro2">
          <table:table-cell table:number-columns-repeated="2"/>
          <table:table-cell table:style-name="ce123" table:number-columns-repeated="5"/>
          <table:table-cell table:style-name="ce138" table:formula="of:=+[.G7]+[.I7]" office:value-type="float" office:value="297" calcext:value-type="float">
            <text:p>297</text:p>
          </table:table-cell>
          <table:table-cell table:style-name="ce123" table:number-columns-repeated="3"/>
          <table:table-cell table:style-name="ce151" table:formula="of:=[.L20]/1000" office:value-type="float" office:value="0.320423488" calcext:value-type="float">
            <text:p>0.320423488</text:p>
          </table:table-cell>
          <table:table-cell table:style-name="ce151" table:formula="of:=[.M20]/1000" office:value-type="float" office:value="0.097271416" calcext:value-type="float">
            <text:p>0.097271416</text:p>
          </table:table-cell>
          <table:table-cell office:value-type="string" calcext:value-type="string">
            <text:p>TM</text:p>
          </table:table-cell>
          <table:table-cell table:number-columns-repeated="17"/>
          <table:table-cell table:style-name="ce201"/>
          <table:table-cell table:style-name="ce196"/>
          <table:table-cell table:style-name="ce198"/>
          <table:table-cell table:style-name="ce207"/>
          <table:table-cell table:style-name="ce211"/>
          <table:table-cell table:style-name="ce189"/>
          <table:table-cell table:number-columns-repeated="16347"/>
        </table:table-row>
        <table:table-row table:style-name="ro2">
          <table:table-cell table:number-columns-repeated="2"/>
          <table:table-cell table:style-name="ce123" table:number-columns-repeated="9"/>
          <table:table-cell table:style-name="ce151" table:number-columns-repeated="2"/>
          <table:table-cell table:number-columns-repeated="18"/>
          <table:table-cell table:style-name="ce201"/>
          <table:table-cell table:style-name="ce196"/>
          <table:table-cell table:style-name="ce198"/>
          <table:table-cell table:style-name="ce207"/>
          <table:table-cell table:style-name="ce211"/>
          <table:table-cell table:style-name="ce189"/>
          <table:table-cell table:number-columns-repeated="16347"/>
        </table:table-row>
        <table:table-row table:style-name="ro2">
          <table:table-cell table:number-columns-repeated="2"/>
          <table:table-cell table:style-name="ce125"/>
          <table:table-cell table:style-name="ce128" office:value-type="string" calcext:value-type="string" table:number-columns-spanned="3" table:number-rows-spanned="1">
            <text:p>INDICE PRODUCTIVO</text:p>
          </table:table-cell>
          <table:covered-table-cell table:number-columns-repeated="2" table:style-name="ce128"/>
          <table:table-cell table:style-name="ce128" office:value-type="string" calcext:value-type="string">
            <text:p>%</text:p>
          </table:table-cell>
          <table:table-cell table:style-name="ce128" office:value-type="string" calcext:value-type="string">
            <text:p>Fn</text:p>
          </table:table-cell>
          <table:table-cell table:style-name="ce128" office:value-type="string" calcext:value-type="string">
            <text:p>Fc</text:p>
          </table:table-cell>
          <table:table-cell table:style-name="ce140"/>
          <table:table-cell table:style-name="ce145"/>
          <table:table-cell table:style-name="ce152"/>
          <table:table-cell table:style-name="ce151"/>
          <table:table-cell table:number-columns-repeated="18"/>
          <table:table-cell table:style-name="ce201"/>
          <table:table-cell table:style-name="ce196"/>
          <table:table-cell table:style-name="ce198"/>
          <table:table-cell table:style-name="ce207"/>
          <table:table-cell table:style-name="ce211"/>
          <table:table-cell table:style-name="ce189"/>
          <table:table-cell table:number-columns-repeated="16347"/>
        </table:table-row>
        <table:table-row table:style-name="ro2">
          <table:table-cell table:number-columns-repeated="2"/>
          <table:table-cell table:style-name="ce125"/>
          <table:table-cell table:style-name="ce129" office:value-type="string" calcext:value-type="string" table:number-columns-spanned="3" table:number-rows-spanned="1">
            <text:p>Natalidad</text:p>
          </table:table-cell>
          <table:covered-table-cell table:style-name="ce130"/>
          <table:covered-table-cell table:style-name="ce131"/>
          <table:table-cell table:style-name="ce133" office:value-type="percentage" office:value="0.85" calcext:value-type="percentage">
            <text:p>85 %</text:p>
          </table:table-cell>
          <table:table-cell table:style-name="ce134" table:formula="of:=+[.G24]/100" office:value-type="float" office:value="0.0085" calcext:value-type="float">
            <text:p>0.0085</text:p>
          </table:table-cell>
          <table:table-cell table:style-name="ce134" table:formula="of:=+[.G24]/100" office:value-type="float" office:value="0.0085" calcext:value-type="float">
            <text:p>0.0085</text:p>
          </table:table-cell>
          <table:table-cell table:style-name="ce141"/>
          <table:table-cell table:style-name="ce140"/>
          <table:table-cell/>
          <table:table-cell table:style-name="ce152"/>
          <table:table-cell table:number-columns-repeated="18"/>
          <table:table-cell table:style-name="ce201"/>
          <table:table-cell table:style-name="ce196"/>
          <table:table-cell table:style-name="ce198"/>
          <table:table-cell table:style-name="ce207"/>
          <table:table-cell table:style-name="ce211"/>
          <table:table-cell table:style-name="ce189"/>
          <table:table-cell table:number-columns-repeated="16347"/>
        </table:table-row>
        <table:table-row table:style-name="ro2">
          <table:table-cell table:number-columns-repeated="2"/>
          <table:table-cell table:style-name="ce126"/>
          <table:table-cell table:style-name="ce129" office:value-type="string" calcext:value-type="string" table:number-columns-spanned="3" table:number-rows-spanned="1">
            <text:p>Mortalidad (Nac-Dest)</text:p>
          </table:table-cell>
          <table:covered-table-cell table:style-name="ce130"/>
          <table:covered-table-cell table:style-name="ce131"/>
          <table:table-cell table:style-name="ce133" office:value-type="percentage" office:value="0.14" calcext:value-type="percentage">
            <text:p>14 %</text:p>
          </table:table-cell>
          <table:table-cell table:style-name="ce134" table:formula="of:=+[.G25]/100" office:value-type="float" office:value="0.0014" calcext:value-type="float">
            <text:p>0.0014</text:p>
          </table:table-cell>
          <table:table-cell table:style-name="ce134" table:formula="of:=1-[.H25]" office:value-type="float" office:value="0.9986" calcext:value-type="float">
            <text:p>0.9986</text:p>
          </table:table-cell>
          <table:table-cell table:style-name="ce140" table:number-columns-repeated="2"/>
          <table:table-cell/>
          <table:table-cell table:formula="of:=+[.G7]/7" office:value-type="float" office:value="37.1428571428571" calcext:value-type="float">
            <text:p>37.1428571428571</text:p>
          </table:table-cell>
          <table:table-cell table:number-columns-repeated="18"/>
          <table:table-cell table:style-name="ce201"/>
          <table:table-cell table:style-name="ce196"/>
          <table:table-cell table:style-name="ce198"/>
          <table:table-cell table:style-name="ce207"/>
          <table:table-cell table:style-name="ce211"/>
          <table:table-cell table:style-name="ce189"/>
          <table:table-cell table:number-columns-repeated="16347"/>
        </table:table-row>
        <table:table-row table:style-name="ro23">
          <table:table-cell table:number-columns-repeated="2"/>
          <table:table-cell table:style-name="ce126"/>
          <table:table-cell table:style-name="ce129" office:value-type="string" calcext:value-type="string" table:number-columns-spanned="3" table:number-rows-spanned="1">
            <text:p>Mortalidad (Dest-3 Meses)</text:p>
          </table:table-cell>
          <table:covered-table-cell table:style-name="ce130"/>
          <table:covered-table-cell table:style-name="ce131"/>
          <table:table-cell table:style-name="ce133" office:value-type="percentage" office:value="0.04" calcext:value-type="percentage">
            <text:p>4 %</text:p>
          </table:table-cell>
          <table:table-cell table:style-name="ce134" table:formula="of:=+[.G26]/100" office:value-type="float" office:value="0.0004" calcext:value-type="float">
            <text:p>0.0004</text:p>
          </table:table-cell>
          <table:table-cell table:style-name="ce134" table:formula="of:=1-[.H26]" office:value-type="float" office:value="0.9996" calcext:value-type="float">
            <text:p>0.9996</text:p>
          </table:table-cell>
          <table:table-cell table:style-name="ce140" table:number-columns-repeated="2"/>
          <table:table-cell table:number-columns-repeated="16"/>
          <table:table-cell table:style-name="ce164" office:value-type="string" calcext:value-type="string">
            <text:p>años</text:p>
          </table:table-cell>
          <table:table-cell table:style-name="ce192" office:value-type="string" calcext:value-type="string">
            <text:p>Población Total Cuyes</text:p>
          </table:table-cell>
          <table:table-cell table:style-name="ce195">
            <draw:frame table:end-cell-address="OFERTA.AJ41" table:end-x="0.197cm" table:end-y="0.343cm" draw:z-index="1" draw:name="Gráfico 1" draw:style-name="gr1" draw:text-style-name="P1" svg:width="13.429cm" svg:height="7.996cm" svg:x="0.357cm" svg:y="1.244cm">
              <draw:object draw:notify-on-update-of-ranges="OFERTA.AC36:OFERTA.AC43 OFERTA.AB36:OFERTA.AB43" xlink:href="./Object 2" xlink:type="simple" xlink:show="embed" xlink:actuate="onLoad">
                <loext:p/>
              </draw:object>
              <draw:image xlink:href="./ObjectReplacements/Object 2" xlink:type="simple" xlink:show="embed" xlink:actuate="onLoad"/>
            </draw:frame>
          </table:table-cell>
          <table:table-cell table:style-name="ce195"/>
          <table:table-cell table:style-name="ce201"/>
          <table:table-cell table:style-name="ce196"/>
          <table:table-cell table:style-name="ce198"/>
          <table:table-cell table:style-name="ce207"/>
          <table:table-cell table:style-name="ce211"/>
          <table:table-cell table:style-name="ce189"/>
          <table:table-cell table:number-columns-repeated="16347"/>
        </table:table-row>
        <table:table-row table:style-name="ro2">
          <table:table-cell table:number-columns-repeated="2"/>
          <table:table-cell table:style-name="ce126"/>
          <table:table-cell table:style-name="ce129" office:value-type="string" calcext:value-type="string" table:number-columns-spanned="3" table:number-rows-spanned="1">
            <text:p>Mortalidad Reproductores</text:p>
          </table:table-cell>
          <table:covered-table-cell table:style-name="ce130"/>
          <table:covered-table-cell table:style-name="ce131"/>
          <table:table-cell table:style-name="ce133" office:value-type="percentage" office:value="0.03" calcext:value-type="percentage">
            <text:p>3 %</text:p>
          </table:table-cell>
          <table:table-cell table:style-name="ce134" table:formula="of:=+[.G27]/100" office:value-type="float" office:value="0.0003" calcext:value-type="float">
            <text:p>0.0003</text:p>
          </table:table-cell>
          <table:table-cell table:style-name="ce134" table:formula="of:=1-[.H27]" office:value-type="float" office:value="0.9997" calcext:value-type="float">
            <text:p>0.9997</text:p>
          </table:table-cell>
          <table:table-cell table:style-name="ce140" table:number-columns-repeated="2"/>
          <table:table-cell table:number-columns-repeated="16"/>
          <table:table-cell table:style-name="ce188" table:formula="of:=+[.AB3]" office:value-type="float" office:value="2012" calcext:value-type="float">
            <text:p>2012</text:p>
          </table:table-cell>
          <table:table-cell table:style-name="ce193" table:formula="of:=+[.AB6]" office:value-type="float" office:value="13273.8" calcext:value-type="float">
            <text:p>13,273.80</text:p>
          </table:table-cell>
          <table:table-cell table:style-name="ce196" table:number-columns-repeated="2"/>
          <table:table-cell table:style-name="ce197" table:number-columns-repeated="2"/>
          <table:table-cell table:style-name="ce198" table:number-columns-repeated="3"/>
          <table:table-cell table:style-name="ce189"/>
          <table:table-cell table:number-columns-repeated="16347"/>
        </table:table-row>
        <table:table-row table:style-name="ro2">
          <table:table-cell table:number-columns-repeated="2"/>
          <table:table-cell table:style-name="ce125"/>
          <table:table-cell table:style-name="ce129" office:value-type="string" calcext:value-type="string" table:number-columns-spanned="3" table:number-rows-spanned="1">
            <text:p>Numero Crias/Camada</text:p>
          </table:table-cell>
          <table:covered-table-cell table:style-name="ce130"/>
          <table:covered-table-cell table:style-name="ce131"/>
          <table:table-cell table:style-name="ce134" office:value-type="float" office:value="2" calcext:value-type="float">
            <text:p>2</text:p>
          </table:table-cell>
          <table:table-cell table:style-name="ce134" table:number-columns-repeated="2"/>
          <table:table-cell table:style-name="ce142"/>
          <table:table-cell table:style-name="ce146"/>
          <table:table-cell table:number-columns-repeated="16"/>
          <table:table-cell table:style-name="ce188" table:formula="of:=+[.AC3]" office:value-type="float" office:value="2013" calcext:value-type="float">
            <text:p>2013</text:p>
          </table:table-cell>
          <table:table-cell table:style-name="ce193" table:formula="of:=+[.AC6]" office:value-type="float" office:value="12850.8" calcext:value-type="float">
            <text:p>12,850.80</text:p>
          </table:table-cell>
          <table:table-cell table:style-name="ce196" table:number-columns-repeated="2"/>
          <table:table-cell table:style-name="ce201"/>
          <table:table-cell table:style-name="ce196"/>
          <table:table-cell table:style-name="ce198" table:number-columns-repeated="3"/>
          <table:table-cell table:style-name="ce189"/>
          <table:table-cell table:number-columns-repeated="16347"/>
        </table:table-row>
        <table:table-row table:style-name="ro2">
          <table:table-cell table:number-columns-repeated="2"/>
          <table:table-cell table:style-name="ce125"/>
          <table:table-cell table:style-name="ce129" office:value-type="string" calcext:value-type="string" table:number-columns-spanned="3" table:number-rows-spanned="1">
            <text:p>Consumo Alimento Prom</text:p>
          </table:table-cell>
          <table:covered-table-cell table:style-name="ce130"/>
          <table:covered-table-cell table:style-name="ce131"/>
          <table:table-cell table:style-name="ce133" office:value-type="percentage" office:value="0.35" calcext:value-type="percentage">
            <text:p>35 %</text:p>
          </table:table-cell>
          <table:table-cell table:style-name="ce134" table:number-columns-repeated="2"/>
          <table:table-cell table:style-name="ce142" table:number-columns-repeated="2"/>
          <table:table-cell table:number-columns-repeated="16"/>
          <table:table-cell table:style-name="ce188" table:formula="of:=+[.AD3]" office:value-type="float" office:value="2014" calcext:value-type="float">
            <text:p>2014</text:p>
          </table:table-cell>
          <table:table-cell table:style-name="ce193" table:formula="of:=+[.AD6]" office:value-type="float" office:value="14521.8" calcext:value-type="float">
            <text:p>14,521.80</text:p>
          </table:table-cell>
          <table:table-cell table:style-name="ce196" table:number-columns-repeated="2"/>
          <table:table-cell table:style-name="ce201"/>
          <table:table-cell table:style-name="ce196"/>
          <table:table-cell table:style-name="ce198" table:number-columns-repeated="3"/>
          <table:table-cell table:style-name="ce189"/>
          <table:table-cell table:number-columns-repeated="16347"/>
        </table:table-row>
        <table:table-row table:style-name="ro2">
          <table:table-cell table:number-columns-repeated="2"/>
          <table:table-cell table:style-name="ce125"/>
          <table:table-cell table:style-name="ce129" office:value-type="string" calcext:value-type="string" table:number-columns-spanned="3" table:number-rows-spanned="1">
            <text:p>Proporcion H:M</text:p>
          </table:table-cell>
          <table:covered-table-cell table:style-name="ce130"/>
          <table:covered-table-cell table:style-name="ce131"/>
          <table:table-cell table:style-name="ce135" office:value-type="time" office:time-value="PT10H01M00S" calcext:value-type="time">
            <text:p>10:01</text:p>
          </table:table-cell>
          <table:table-cell table:style-name="ce134" table:number-columns-repeated="2"/>
          <table:table-cell table:style-name="ce142" table:number-columns-repeated="2"/>
          <table:table-cell table:number-columns-repeated="16"/>
          <table:table-cell table:style-name="ce188" table:formula="of:=+[.AE3]" office:value-type="float" office:value="2015" calcext:value-type="float">
            <text:p>2015</text:p>
          </table:table-cell>
          <table:table-cell table:style-name="ce193" table:formula="of:=+[.AE6]" office:value-type="float" office:value="14356.8" calcext:value-type="float">
            <text:p>14,356.80</text:p>
          </table:table-cell>
          <table:table-cell table:style-name="ce196" table:number-columns-repeated="2"/>
          <table:table-cell table:style-name="ce201"/>
          <table:table-cell table:style-name="ce196"/>
          <table:table-cell table:style-name="ce198" table:number-columns-repeated="3"/>
          <table:table-cell table:style-name="ce189"/>
          <table:table-cell table:number-columns-repeated="16347"/>
        </table:table-row>
        <table:table-row table:style-name="ro2">
          <table:table-cell table:number-columns-repeated="2"/>
          <table:table-cell table:style-name="ce126"/>
          <table:table-cell table:style-name="ce129" office:value-type="string" calcext:value-type="string" table:number-columns-spanned="3" table:number-rows-spanned="1">
            <text:p>Tope Max. Produccion</text:p>
          </table:table-cell>
          <table:covered-table-cell table:style-name="ce130"/>
          <table:covered-table-cell table:style-name="ce131"/>
          <table:table-cell table:style-name="ce136" office:value-type="float" office:value="1100" calcext:value-type="float">
            <text:p>1100</text:p>
          </table:table-cell>
          <table:table-cell table:style-name="ce134" table:number-columns-repeated="2"/>
          <table:table-cell table:style-name="ce140" table:number-columns-repeated="2"/>
          <table:table-cell table:number-columns-repeated="16"/>
          <table:table-cell table:style-name="ce188" table:formula="of:=+[.AF3]" office:value-type="float" office:value="2016" calcext:value-type="float">
            <text:p>2016</text:p>
          </table:table-cell>
          <table:table-cell table:style-name="ce193" table:formula="of:=+[.AF6]" office:value-type="float" office:value="15326.4" calcext:value-type="float">
            <text:p>15,326.40</text:p>
          </table:table-cell>
          <table:table-cell table:style-name="ce196" table:number-columns-repeated="2"/>
          <table:table-cell table:style-name="ce201"/>
          <table:table-cell table:style-name="ce196"/>
          <table:table-cell table:style-name="ce198" table:number-columns-repeated="3"/>
          <table:table-cell table:style-name="ce189"/>
          <table:table-cell table:number-columns-repeated="16347"/>
        </table:table-row>
        <table:table-row table:style-name="ro22">
          <table:table-cell table:number-columns-repeated="27"/>
          <table:table-cell table:style-name="ce188" table:formula="of:=+[.AG3]" office:value-type="float" office:value="2017" calcext:value-type="float">
            <text:p>2017</text:p>
          </table:table-cell>
          <table:table-cell table:style-name="ce193" table:formula="of:=+[.AG6]" office:value-type="float" office:value="15978" calcext:value-type="float">
            <text:p>15,978.00</text:p>
          </table:table-cell>
          <table:table-cell table:style-name="ce196" table:number-columns-repeated="2"/>
          <table:table-cell table:style-name="ce201"/>
          <table:table-cell table:style-name="ce196"/>
          <table:table-cell table:style-name="ce198" table:number-columns-repeated="3"/>
          <table:table-cell table:style-name="ce189"/>
          <table:table-cell table:number-columns-repeated="16347"/>
        </table:table-row>
        <table:table-row table:style-name="ro2">
          <table:table-cell table:number-columns-repeated="27"/>
          <table:table-cell table:style-name="ce188" table:formula="of:=+[.AH3]" office:value-type="float" office:value="2018" calcext:value-type="float">
            <text:p>2018</text:p>
          </table:table-cell>
          <table:table-cell table:style-name="ce193" table:formula="of:=+[.AH6]" office:value-type="float" office:value="14145.6" calcext:value-type="float">
            <text:p>14,145.60</text:p>
          </table:table-cell>
          <table:table-cell table:style-name="ce196" table:number-columns-repeated="2"/>
          <table:table-cell table:style-name="ce201"/>
          <table:table-cell table:style-name="ce196"/>
          <table:table-cell table:style-name="ce198" table:number-columns-repeated="3"/>
          <table:table-cell table:style-name="ce189"/>
          <table:table-cell table:number-columns-repeated="16347"/>
        </table:table-row>
        <table:table-row table:style-name="ro2">
          <table:table-cell table:number-columns-repeated="15"/>
          <table:table-cell table:style-name="ce158" table:number-columns-repeated="11"/>
          <table:table-cell/>
          <table:table-cell table:style-name="ce188" table:formula="of:=+[.AI3]" office:value-type="float" office:value="2019" calcext:value-type="float">
            <text:p>2019</text:p>
          </table:table-cell>
          <table:table-cell table:style-name="ce193" table:formula="of:=+[.AI6]" office:value-type="float" office:value="13662.6" calcext:value-type="float">
            <text:p>13,662.60</text:p>
          </table:table-cell>
          <table:table-cell table:style-name="ce196" table:number-columns-repeated="2"/>
          <table:table-cell table:style-name="ce201"/>
          <table:table-cell table:style-name="ce196"/>
          <table:table-cell table:style-name="ce198" table:number-columns-repeated="3"/>
          <table:table-cell table:style-name="ce189"/>
          <table:table-cell table:number-columns-repeated="16347"/>
        </table:table-row>
        <table:table-row table:style-name="ro2">
          <table:table-cell table:number-columns-repeated="15"/>
          <table:table-cell table:style-name="ce159" office:value-type="string" calcext:value-type="string" table:number-columns-spanned="7" table:number-rows-spanned="1">
            <text:p>PRODUCCIÓN DE CUY DE LA ASOCIACION DE PRODUCTORES AGROPECUARIOS</text:p>
          </table:table-cell>
          <table:covered-table-cell table:number-columns-repeated="6" table:style-name="ce169"/>
          <table:table-cell table:style-name="ce158"/>
          <table:table-cell table:style-name="ce179" table:number-columns-repeated="2"/>
          <table:table-cell table:style-name="ce184"/>
          <table:table-cell/>
          <table:table-cell table:style-name="ce164" office:value-type="string" calcext:value-type="string">
            <text:p>X</text:p>
          </table:table-cell>
          <table:table-cell table:style-name="ce164" office:value-type="string" calcext:value-type="string">
            <text:p>Y</text:p>
          </table:table-cell>
          <table:table-cell table:style-name="ce197" table:number-columns-repeated="2"/>
          <table:table-cell table:style-name="ce201"/>
          <table:table-cell table:style-name="ce196"/>
          <table:table-cell table:style-name="ce198" table:number-columns-repeated="3"/>
          <table:table-cell table:style-name="ce189"/>
          <table:table-cell table:number-columns-repeated="16347"/>
        </table:table-row>
        <table:table-row table:style-name="ro24">
          <table:table-cell table:number-columns-repeated="6"/>
          <table:table-cell office:value-type="float" office:value="8" calcext:value-type="float">
            <text:p>8</text:p>
          </table:table-cell>
          <table:table-cell table:number-columns-repeated="2" office:value-type="float" office:value="13" calcext:value-type="float">
            <text:p>13</text:p>
          </table:table-cell>
          <table:table-cell office:value-type="float" office:value="8" calcext:value-type="float">
            <text:p>8</text:p>
          </table:table-cell>
          <table:table-cell table:formula="of:=SUM([.G36:.J36])" office:value-type="float" office:value="42" calcext:value-type="float">
            <text:p>42</text:p>
          </table:table-cell>
          <table:table-cell table:number-columns-repeated="4"/>
          <table:table-cell table:style-name="ce160" office:value-type="string" calcext:value-type="string">
            <text:p>AÑO</text:p>
          </table:table-cell>
          <table:table-cell table:style-name="ce160" office:value-type="string" calcext:value-type="string">
            <text:p>OFERTA CON PROYECTO CARNE DE CUY UNID/ANUALES</text:p>
          </table:table-cell>
          <table:table-cell table:style-name="ce174"/>
          <table:table-cell table:style-name="ce162" table:number-columns-repeated="4"/>
          <table:table-cell table:style-name="ce158"/>
          <table:table-cell table:style-name="ce180" table:number-columns-repeated="2"/>
          <table:table-cell table:style-name="ce185"/>
          <table:table-cell/>
          <table:table-cell table:style-name="ce188" office:value-type="float" office:value="1" calcext:value-type="float">
            <text:p>1</text:p>
          </table:table-cell>
          <table:table-cell table:style-name="ce193" table:formula="of:=+[.AC27]" office:value-type="float" office:value="13273.8" calcext:value-type="float">
            <text:p>13,273.80</text:p>
          </table:table-cell>
          <table:table-cell table:style-name="ce196" table:number-columns-repeated="2"/>
          <table:table-cell table:style-name="ce201"/>
          <table:table-cell table:style-name="ce196"/>
          <table:table-cell table:style-name="ce198" table:number-columns-repeated="3"/>
          <table:table-cell table:style-name="ce189"/>
          <table:table-cell table:number-columns-repeated="16347"/>
        </table:table-row>
        <table:table-row table:style-name="ro2">
          <table:table-cell table:number-columns-repeated="6"/>
          <table:table-cell office:value-type="float" office:value="10" calcext:value-type="float">
            <text:p>10</text:p>
          </table:table-cell>
          <table:table-cell table:number-columns-repeated="2" office:value-type="float" office:value="15" calcext:value-type="float">
            <text:p>15</text:p>
          </table:table-cell>
          <table:table-cell office:value-type="float" office:value="10" calcext:value-type="float">
            <text:p>10</text:p>
          </table:table-cell>
          <table:table-cell table:formula="of:=SUM([.G37:.J37])" office:value-type="float" office:value="50" calcext:value-type="float">
            <text:p>50</text:p>
          </table:table-cell>
          <table:table-cell table:number-columns-repeated="4"/>
          <table:table-cell table:style-name="ce161" office:value-type="float" office:value="2020" calcext:value-type="float">
            <text:p>2020</text:p>
          </table:table-cell>
          <table:table-cell table:style-name="ce170" office:value-type="float" office:value="0" calcext:value-type="float">
            <text:p>0</text:p>
          </table:table-cell>
          <table:table-cell table:style-name="ce174"/>
          <table:table-cell table:style-name="ce162" table:number-columns-repeated="4"/>
          <table:table-cell table:style-name="ce158"/>
          <table:table-cell table:style-name="ce181"/>
          <table:table-cell table:style-name="ce183"/>
          <table:table-cell table:style-name="ce185"/>
          <table:table-cell/>
          <table:table-cell table:style-name="ce188" office:value-type="float" office:value="2" calcext:value-type="float">
            <text:p>2</text:p>
          </table:table-cell>
          <table:table-cell table:style-name="ce193" table:formula="of:=+[.AC28]" office:value-type="float" office:value="12850.8" calcext:value-type="float">
            <text:p>12,850.80</text:p>
          </table:table-cell>
          <table:table-cell table:style-name="ce196" table:number-columns-repeated="2"/>
          <table:table-cell table:style-name="ce202"/>
          <table:table-cell table:style-name="ce203"/>
          <table:table-cell table:style-name="ce189" table:number-columns-repeated="4"/>
          <table:table-cell table:number-columns-repeated="16347"/>
        </table:table-row>
        <table:table-row table:style-name="ro2">
          <table:table-cell table:number-columns-repeated="15"/>
          <table:table-cell table:style-name="ce161" table:formula="of:=+[.P37]+1" office:value-type="float" office:value="2021" calcext:value-type="float">
            <text:p>2021</text:p>
          </table:table-cell>
          <table:table-cell table:style-name="ce171" table:formula="of:=+[.O11]*2" office:value-type="float" office:value="3185.70442141921" calcext:value-type="float">
            <text:p>3,186</text:p>
          </table:table-cell>
          <table:table-cell table:style-name="ce175"/>
          <table:table-cell table:style-name="ce162" table:number-columns-repeated="4"/>
          <table:table-cell table:style-name="ce158"/>
          <table:table-cell table:style-name="ce181"/>
          <table:table-cell table:style-name="ce183"/>
          <table:table-cell table:style-name="ce185"/>
          <table:table-cell/>
          <table:table-cell table:style-name="ce188" office:value-type="float" office:value="3" calcext:value-type="float">
            <text:p>3</text:p>
          </table:table-cell>
          <table:table-cell table:style-name="ce193" table:formula="of:=+[.AC29]" office:value-type="float" office:value="14521.8" calcext:value-type="float">
            <text:p>14,521.80</text:p>
          </table:table-cell>
          <table:table-cell table:style-name="ce196" table:number-columns-repeated="2"/>
          <table:table-cell table:style-name="ce202"/>
          <table:table-cell table:style-name="ce203"/>
          <table:table-cell table:style-name="ce189" table:number-columns-repeated="4"/>
          <table:table-cell table:number-columns-repeated="16347"/>
        </table:table-row>
        <table:table-row table:style-name="ro2">
          <table:table-cell table:number-columns-repeated="6"/>
          <table:table-cell table:formula="of:=+[.G36]*[.G37]" office:value-type="float" office:value="80" calcext:value-type="float">
            <text:p>80</text:p>
          </table:table-cell>
          <table:table-cell table:formula="of:=+[.H36]*[.H37]" office:value-type="float" office:value="195" calcext:value-type="float">
            <text:p>195</text:p>
          </table:table-cell>
          <table:table-cell table:formula="of:=+[.I36]*[.I37]" office:value-type="float" office:value="195" calcext:value-type="float">
            <text:p>195</text:p>
          </table:table-cell>
          <table:table-cell table:formula="of:=+[.J36]*[.J37]" office:value-type="float" office:value="80" calcext:value-type="float">
            <text:p>80</text:p>
          </table:table-cell>
          <table:table-cell table:formula="of:=SUM([.G39:.J39])" office:value-type="float" office:value="550" calcext:value-type="float">
            <text:p>550</text:p>
          </table:table-cell>
          <table:table-cell table:number-columns-repeated="4"/>
          <table:table-cell table:style-name="ce161" table:formula="of:=+[.P38]+1" office:value-type="float" office:value="2022" calcext:value-type="float">
            <text:p>2022</text:p>
          </table:table-cell>
          <table:table-cell table:style-name="ce171" table:formula="of:=+[.O15]*2" office:value-type="float" office:value="11443.696" calcext:value-type="float">
            <text:p>11,444</text:p>
          </table:table-cell>
          <table:table-cell table:style-name="ce175"/>
          <table:table-cell table:style-name="ce162" table:number-columns-repeated="4"/>
          <table:table-cell table:style-name="ce158"/>
          <table:table-cell table:style-name="ce181"/>
          <table:table-cell table:style-name="ce183"/>
          <table:table-cell table:style-name="ce185"/>
          <table:table-cell/>
          <table:table-cell table:style-name="ce188" office:value-type="float" office:value="4" calcext:value-type="float">
            <text:p>4</text:p>
          </table:table-cell>
          <table:table-cell table:style-name="ce193" table:formula="of:=+[.AC30]" office:value-type="float" office:value="14356.8" calcext:value-type="float">
            <text:p>14,356.80</text:p>
          </table:table-cell>
          <table:table-cell table:style-name="ce196" table:number-columns-repeated="2"/>
          <table:table-cell table:style-name="ce189" table:number-columns-repeated="6"/>
          <table:table-cell table:number-columns-repeated="16347"/>
        </table:table-row>
        <table:table-row table:style-name="ro2">
          <table:table-cell table:number-columns-repeated="10"/>
          <table:table-cell table:formula="of:=+[.K39]*2" office:value-type="float" office:value="1100" calcext:value-type="float">
            <text:p>1100</text:p>
          </table:table-cell>
          <table:table-cell table:number-columns-repeated="4"/>
          <table:table-cell table:style-name="ce161" table:formula="of:=+[.P39]+1" office:value-type="float" office:value="2023" calcext:value-type="float">
            <text:p>2023</text:p>
          </table:table-cell>
          <table:table-cell table:style-name="ce171" table:formula="of:=+[.O19]*2" office:value-type="float" office:value="11443.696" calcext:value-type="float">
            <text:p>11,444</text:p>
          </table:table-cell>
          <table:table-cell table:style-name="ce175"/>
          <table:table-cell table:style-name="ce162" table:number-columns-repeated="4"/>
          <table:table-cell table:style-name="ce158"/>
          <table:table-cell table:style-name="ce181"/>
          <table:table-cell table:style-name="ce183"/>
          <table:table-cell table:style-name="ce185"/>
          <table:table-cell/>
          <table:table-cell table:style-name="ce188" office:value-type="float" office:value="5" calcext:value-type="float">
            <text:p>5</text:p>
          </table:table-cell>
          <table:table-cell table:style-name="ce193" table:formula="of:=+[.AC31]" office:value-type="float" office:value="15326.4" calcext:value-type="float">
            <text:p>15,326.40</text:p>
          </table:table-cell>
          <table:table-cell table:style-name="ce196" table:number-columns-repeated="2"/>
          <table:table-cell table:style-name="ce189" table:number-columns-repeated="6"/>
          <table:table-cell table:number-columns-repeated="16347"/>
        </table:table-row>
        <table:table-row table:style-name="ro2">
          <table:table-cell table:number-columns-repeated="15"/>
          <table:table-cell table:style-name="ce161" table:formula="of:=+[.P40]+1" office:value-type="float" office:value="2024" calcext:value-type="float">
            <text:p>2024</text:p>
          </table:table-cell>
          <table:table-cell table:style-name="ce171" table:formula="of:=+[.Q40]" office:value-type="float" office:value="11443.696" calcext:value-type="float">
            <text:p>11,444</text:p>
          </table:table-cell>
          <table:table-cell table:style-name="ce175"/>
          <table:table-cell table:style-name="ce162" table:number-columns-repeated="4"/>
          <table:table-cell table:style-name="ce158"/>
          <table:table-cell table:style-name="ce181"/>
          <table:table-cell table:style-name="ce183"/>
          <table:table-cell table:style-name="ce185"/>
          <table:table-cell/>
          <table:table-cell table:style-name="ce188" office:value-type="float" office:value="6" calcext:value-type="float">
            <text:p>6</text:p>
          </table:table-cell>
          <table:table-cell table:style-name="ce193" table:formula="of:=+[.AC32]" office:value-type="float" office:value="15978" calcext:value-type="float">
            <text:p>15,978.00</text:p>
          </table:table-cell>
          <table:table-cell table:style-name="ce196" table:number-columns-repeated="2"/>
          <table:table-cell table:style-name="ce198" table:number-columns-repeated="5"/>
          <table:table-cell table:style-name="ce189"/>
          <table:table-cell table:number-columns-repeated="16347"/>
        </table:table-row>
        <table:table-row table:style-name="ro2">
          <table:table-cell table:number-columns-repeated="15"/>
          <table:table-cell table:style-name="ce161" table:formula="of:=+[.P41]+1" office:value-type="float" office:value="2025" calcext:value-type="float">
            <text:p>2025</text:p>
          </table:table-cell>
          <table:table-cell table:style-name="ce171" table:formula="of:=+[.Q41]" office:value-type="float" office:value="11443.696" calcext:value-type="float">
            <text:p>11,444</text:p>
          </table:table-cell>
          <table:table-cell table:style-name="ce175"/>
          <table:table-cell table:style-name="ce162" table:number-columns-repeated="4"/>
          <table:table-cell table:style-name="ce158"/>
          <table:table-cell table:style-name="ce181"/>
          <table:table-cell table:style-name="ce183"/>
          <table:table-cell table:style-name="ce185"/>
          <table:table-cell/>
          <table:table-cell table:style-name="ce188" office:value-type="float" office:value="7" calcext:value-type="float">
            <text:p>7</text:p>
          </table:table-cell>
          <table:table-cell table:style-name="ce193" table:formula="of:=+[.AC33]" office:value-type="float" office:value="14145.6" calcext:value-type="float">
            <text:p>14,145.60</text:p>
          </table:table-cell>
          <table:table-cell table:style-name="ce196" table:number-columns-repeated="2"/>
          <table:table-cell table:style-name="ce198" table:number-columns-repeated="5"/>
          <table:table-cell table:style-name="ce189"/>
          <table:table-cell table:number-columns-repeated="16347"/>
        </table:table-row>
        <table:table-row table:style-name="ro2">
          <table:table-cell table:number-columns-repeated="15"/>
          <table:table-cell table:style-name="ce162" table:number-columns-repeated="7"/>
          <table:table-cell table:style-name="ce158" table:number-columns-repeated="4"/>
          <table:table-cell/>
          <table:table-cell table:style-name="ce188" office:value-type="float" office:value="8" calcext:value-type="float">
            <text:p>8</text:p>
          </table:table-cell>
          <table:table-cell table:style-name="ce193" table:formula="of:=+[.AC34]" office:value-type="float" office:value="13662.6" calcext:value-type="float">
            <text:p>13,662.60</text:p>
          </table:table-cell>
          <table:table-cell table:style-name="ce196" table:number-columns-repeated="2"/>
          <table:table-cell table:style-name="ce198" table:number-columns-repeated="5"/>
          <table:table-cell table:style-name="ce189"/>
          <table:table-cell table:number-columns-repeated="16347"/>
        </table:table-row>
        <table:table-row table:style-name="ro2">
          <table:table-cell table:number-columns-repeated="15"/>
          <table:table-cell table:style-name="ce158" table:number-columns-repeated="11"/>
          <table:table-cell table:number-columns-repeated="3"/>
          <table:table-cell table:style-name="ce198"/>
          <table:table-cell table:style-name="ce197" table:number-columns-repeated="2"/>
          <table:table-cell table:style-name="ce195"/>
          <table:table-cell table:style-name="ce198"/>
          <table:table-cell table:style-name="ce197"/>
          <table:table-cell table:style-name="ce195"/>
          <table:table-cell table:number-columns-repeated="16348"/>
        </table:table-row>
        <table:table-row table:style-name="ro2">
          <table:table-cell table:number-columns-repeated="17"/>
          <table:table-cell>
            <draw:frame table:end-cell-address="OFERTA.W65" table:end-x="0.714cm" table:end-y="0.078cm" draw:z-index="0" draw:name="4 Gráfico" draw:style-name="gr1" draw:text-style-name="P1" svg:width="10.997cm" svg:height="10.697cm" svg:x="0.9cm" svg:y="0.026cm">
              <draw:object draw:notify-on-update-of-ranges="OFERTA.Q36:OFERTA.Q36 OFERTA.Q37:OFERTA.Q42" xlink:href="./Object 1" xlink:type="simple" xlink:show="embed" xlink:actuate="onLoad">
                <loext:p/>
              </draw:object>
              <draw:image xlink:href="./ObjectReplacements/Object 1" xlink:type="simple" xlink:show="embed" xlink:actuate="onLoad"/>
            </draw:frame>
          </table:table-cell>
          <table:table-cell table:number-columns-repeated="11"/>
          <table:table-cell table:style-name="ce198"/>
          <table:table-cell table:style-name="ce201" table:number-columns-repeated="2"/>
          <table:table-cell table:style-name="ce204"/>
          <table:table-cell table:style-name="ce198"/>
          <table:table-cell table:style-name="ce208"/>
          <table:table-cell table:style-name="ce212"/>
          <table:table-cell table:number-columns-repeated="16348"/>
        </table:table-row>
        <table:table-row table:style-name="ro2" table:number-rows-repeated="2">
          <table:table-cell table:number-columns-repeated="29"/>
          <table:table-cell table:style-name="ce198"/>
          <table:table-cell table:style-name="ce201" table:number-columns-repeated="2"/>
          <table:table-cell table:style-name="ce204"/>
          <table:table-cell table:style-name="ce198"/>
          <table:table-cell table:style-name="ce208"/>
          <table:table-cell table:style-name="ce212"/>
          <table:table-cell table:number-columns-repeated="16348"/>
        </table:table-row>
        <table:table-row table:style-name="ro23">
          <table:table-cell table:number-columns-repeated="26"/>
          <table:table-cell table:style-name="ce164"/>
          <table:table-cell table:style-name="ce164" office:value-type="string" calcext:value-type="string">
            <text:p>Años</text:p>
          </table:table-cell>
          <table:table-cell table:style-name="ce192" office:value-type="string" calcext:value-type="string">
            <text:p>Población Total Cuyes</text:p>
          </table:table-cell>
          <table:table-cell table:style-name="ce198"/>
          <table:table-cell table:style-name="ce201" table:number-columns-repeated="2"/>
          <table:table-cell table:style-name="ce204"/>
          <table:table-cell table:style-name="ce198"/>
          <table:table-cell table:style-name="ce208"/>
          <table:table-cell table:style-name="ce212"/>
          <table:table-cell table:number-columns-repeated="16348"/>
        </table:table-row>
        <table:table-row table:style-name="ro2">
          <table:table-cell table:number-columns-repeated="26"/>
          <table:table-cell table:style-name="ce188" office:value-type="float" office:value="9" calcext:value-type="float">
            <text:p>9</text:p>
          </table:table-cell>
          <table:table-cell table:style-name="ce188" table:formula="of:=+[.AB34]+1" office:value-type="float" office:value="2020" calcext:value-type="float">
            <text:p>2020</text:p>
          </table:table-cell>
          <table:table-cell table:style-name="ce194" table:formula="of:=13486+173.02*[.AA49]" office:value-type="float" office:value="15043.18" calcext:value-type="float">
            <text:p>15,043</text:p>
          </table:table-cell>
          <table:table-cell table:style-name="ce198"/>
          <table:table-cell table:style-name="ce201" table:number-columns-repeated="2"/>
          <table:table-cell table:style-name="ce204"/>
          <table:table-cell table:style-name="ce198"/>
          <table:table-cell table:style-name="ce208"/>
          <table:table-cell table:style-name="ce212"/>
          <table:table-cell table:number-columns-repeated="16348"/>
        </table:table-row>
        <table:table-row table:style-name="ro2">
          <table:table-cell table:number-columns-repeated="26"/>
          <table:table-cell table:style-name="ce188" table:formula="of:=+[.AA49]+1" office:value-type="float" office:value="10" calcext:value-type="float">
            <text:p>10</text:p>
          </table:table-cell>
          <table:table-cell table:style-name="ce188" table:formula="of:=+[.AB49]+1" office:value-type="float" office:value="2021" calcext:value-type="float">
            <text:p>2021</text:p>
          </table:table-cell>
          <table:table-cell table:style-name="ce194" table:formula="of:=13486+173.02*[.AA50]" office:value-type="float" office:value="15216.2" calcext:value-type="float">
            <text:p>15,216</text:p>
          </table:table-cell>
          <table:table-cell table:style-name="ce198"/>
          <table:table-cell table:style-name="ce201" table:number-columns-repeated="2"/>
          <table:table-cell table:style-name="ce204"/>
          <table:table-cell table:style-name="ce198"/>
          <table:table-cell table:style-name="ce208"/>
          <table:table-cell table:style-name="ce212"/>
          <table:table-cell table:number-columns-repeated="16348"/>
        </table:table-row>
        <table:table-row table:style-name="ro2">
          <table:table-cell table:number-columns-repeated="26"/>
          <table:table-cell table:style-name="ce188" table:formula="of:=+[.AA50]+1" office:value-type="float" office:value="11" calcext:value-type="float">
            <text:p>11</text:p>
          </table:table-cell>
          <table:table-cell table:style-name="ce188" table:formula="of:=+[.AB50]+1" office:value-type="float" office:value="2022" calcext:value-type="float">
            <text:p>2022</text:p>
          </table:table-cell>
          <table:table-cell table:style-name="ce194" table:formula="of:=13486+173.02*[.AA51]" office:value-type="float" office:value="15389.22" calcext:value-type="float">
            <text:p>15,389</text:p>
          </table:table-cell>
          <table:table-cell table:style-name="ce198"/>
          <table:table-cell table:style-name="ce201" table:number-columns-repeated="2"/>
          <table:table-cell table:style-name="ce204"/>
          <table:table-cell table:style-name="ce198"/>
          <table:table-cell table:style-name="ce208"/>
          <table:table-cell table:style-name="ce212"/>
          <table:table-cell table:number-columns-repeated="16348"/>
        </table:table-row>
        <table:table-row table:style-name="ro2">
          <table:table-cell table:number-columns-repeated="26"/>
          <table:table-cell table:style-name="ce188" table:formula="of:=+[.AA51]+1" office:value-type="float" office:value="12" calcext:value-type="float">
            <text:p>12</text:p>
          </table:table-cell>
          <table:table-cell table:style-name="ce188" table:formula="of:=+[.AB51]+1" office:value-type="float" office:value="2023" calcext:value-type="float">
            <text:p>2023</text:p>
          </table:table-cell>
          <table:table-cell table:style-name="ce194" table:formula="of:=13486+173.02*[.AA52]" office:value-type="float" office:value="15562.24" calcext:value-type="float">
            <text:p>15,562</text:p>
          </table:table-cell>
          <table:table-cell table:style-name="ce198"/>
          <table:table-cell table:style-name="ce201" table:number-columns-repeated="2"/>
          <table:table-cell table:style-name="ce204"/>
          <table:table-cell table:style-name="ce198"/>
          <table:table-cell table:style-name="ce208"/>
          <table:table-cell table:style-name="ce212"/>
          <table:table-cell table:number-columns-repeated="16348"/>
        </table:table-row>
        <table:table-row table:style-name="ro2">
          <table:table-cell table:number-columns-repeated="26"/>
          <table:table-cell table:style-name="ce188" table:formula="of:=+[.AA52]+1" office:value-type="float" office:value="13" calcext:value-type="float">
            <text:p>13</text:p>
          </table:table-cell>
          <table:table-cell table:style-name="ce188" table:formula="of:=+[.AB52]+1" office:value-type="float" office:value="2024" calcext:value-type="float">
            <text:p>2024</text:p>
          </table:table-cell>
          <table:table-cell table:style-name="ce194" table:formula="of:=13486+173.02*[.AA53]" office:value-type="float" office:value="15735.26" calcext:value-type="float">
            <text:p>15,735</text:p>
          </table:table-cell>
          <table:table-cell table:style-name="ce199"/>
          <table:table-cell table:style-name="ce202" table:number-columns-repeated="2"/>
          <table:table-cell table:style-name="ce205"/>
          <table:table-cell table:style-name="ce199"/>
          <table:table-cell table:style-name="ce209"/>
          <table:table-cell table:style-name="ce213"/>
          <table:table-cell table:number-columns-repeated="16348"/>
        </table:table-row>
        <table:table-row table:style-name="ro2">
          <table:table-cell table:number-columns-repeated="26"/>
          <table:table-cell table:style-name="ce188" table:formula="of:=+[.AA53]+1" office:value-type="float" office:value="14" calcext:value-type="float">
            <text:p>14</text:p>
          </table:table-cell>
          <table:table-cell table:style-name="ce188" table:formula="of:=+[.AB53]+1" office:value-type="float" office:value="2025" calcext:value-type="float">
            <text:p>2025</text:p>
          </table:table-cell>
          <table:table-cell table:style-name="ce194" table:formula="of:=13486+173.02*[.AA54]" office:value-type="float" office:value="15908.28" calcext:value-type="float">
            <text:p>15,908</text:p>
          </table:table-cell>
          <table:table-cell table:style-name="ce199"/>
          <table:table-cell table:style-name="ce202" table:number-columns-repeated="2"/>
          <table:table-cell table:style-name="ce205"/>
          <table:table-cell table:style-name="ce199"/>
          <table:table-cell table:style-name="ce209"/>
          <table:table-cell table:style-name="ce213"/>
          <table:table-cell table:number-columns-repeated="16348"/>
        </table:table-row>
        <table:table-row table:style-name="ro2" table:number-rows-repeated="3">
          <table:table-cell table:number-columns-repeated="29"/>
          <table:table-cell table:style-name="ce199"/>
          <table:table-cell table:style-name="ce202" table:number-columns-repeated="2"/>
          <table:table-cell table:style-name="ce205"/>
          <table:table-cell table:style-name="ce199"/>
          <table:table-cell table:style-name="ce209"/>
          <table:table-cell table:style-name="ce213"/>
          <table:table-cell table:number-columns-repeated="16348"/>
        </table:table-row>
        <table:table-row table:style-name="ro2" table:number-rows-repeated="2">
          <table:table-cell table:number-columns-repeated="29"/>
          <table:table-cell table:style-name="ce199"/>
          <table:table-cell table:style-name="ce202" table:number-columns-repeated="2"/>
          <table:table-cell table:style-name="ce205"/>
          <table:table-cell table:style-name="ce199"/>
          <table:table-cell table:style-name="ce209"/>
          <table:table-cell table:style-name="ce213"/>
          <table:table-cell/>
          <table:table-cell table:style-name="ce189"/>
          <table:table-cell table:number-columns-repeated="16346"/>
        </table:table-row>
        <table:table-row table:style-name="ro2" table:number-rows-repeated="2">
          <table:table-cell table:number-columns-repeated="29"/>
          <table:table-cell table:style-name="ce189" table:number-columns-repeated="9"/>
          <table:table-cell table:number-columns-repeated="16346"/>
        </table:table-row>
        <table:table-row table:style-name="ro2" table:number-rows-repeated="4">
          <table:table-cell table:number-columns-repeated="26"/>
          <table:table-cell table:style-name="ce189" table:number-columns-repeated="12"/>
          <table:table-cell table:number-columns-repeated="16346"/>
        </table:table-row>
        <table:table-row table:style-name="ro25">
          <table:table-cell table:number-columns-repeated="26"/>
          <table:table-cell table:style-name="ce189" table:number-columns-repeated="12"/>
          <table:table-cell table:number-columns-repeated="16346"/>
        </table:table-row>
        <table:table-row table:style-name="ro25" table:number-rows-repeated="10">
          <table:table-cell table:number-columns-repeated="26"/>
          <table:table-cell table:style-name="ce189" table:number-columns-repeated="14"/>
          <table:table-cell table:number-columns-repeated="16344"/>
        </table:table-row>
        <table:table-row table:style-name="ro25" table:number-rows-repeated="2">
          <table:table-cell table:number-columns-repeated="26"/>
          <table:table-cell table:style-name="ce189" table:number-columns-repeated="11"/>
          <table:table-cell table:number-columns-repeated="16347"/>
        </table:table-row>
        <table:table-row table:style-name="ro1" table:number-rows-repeated="1048497">
          <table:table-cell table:number-columns-repeated="16384"/>
        </table:table-row>
        <table:table-row table:style-name="ro1">
          <table:table-cell table:number-columns-repeated="16384"/>
        </table:table-row>
      </table:table>
      <table:table table:name="BRECHA" table:style-name="ta4">
        <table:table-column table:style-name="co38" table:default-cell-style-name="ce217"/>
        <table:table-column table:style-name="co10" table:default-cell-style-name="ce217"/>
        <table:table-column table:style-name="co39" table:default-cell-style-name="ce217"/>
        <table:table-column table:style-name="co40" table:default-cell-style-name="ce217"/>
        <table:table-column table:style-name="co1" table:number-columns-repeated="16380" table:default-cell-style-name="ce217"/>
        <table:table-row table:style-name="ro6">
          <table:table-cell table:style-name="ce214" office:value-type="string" calcext:value-type="string" table:number-columns-spanned="4" table:number-rows-spanned="1">
            <text:p>DETERMINACION DE LA BRECHA DEMANDA-OFERTA</text:p>
          </table:table-cell>
          <table:covered-table-cell table:number-columns-repeated="3" table:style-name="ce214"/>
          <table:table-cell table:number-columns-repeated="16380"/>
        </table:table-row>
        <table:table-row table:style-name="ro25">
          <table:table-cell table:style-name="ce192" office:value-type="string" calcext:value-type="string">
            <text:p>AÑO</text:p>
          </table:table-cell>
          <table:table-cell table:style-name="ce192" office:value-type="string" calcext:value-type="string">
            <text:p>DEMANDA</text:p>
          </table:table-cell>
          <table:table-cell table:style-name="ce192" office:value-type="string" calcext:value-type="string">
            <text:p>OFERTA</text:p>
          </table:table-cell>
          <table:table-cell table:style-name="ce192" office:value-type="string" calcext:value-type="string">
            <text:p>BRECHA</text:p>
          </table:table-cell>
          <table:table-cell table:number-columns-repeated="16380"/>
        </table:table-row>
        <table:table-row table:style-name="ro25">
          <table:table-cell table:style-name="ce215" table:formula="of:=+['file:///home/achalmaedison/Documentos/gestion%20empresarial/planes%20de%20negocio/ganadores%20categoria%20a%20procompite%202020/02%20asociacion%20pamparque%20puquio%20cuy/ANALISIS%20TECNICO%20FINANCIERO.xls'#$OFERTA.P37]" office:value-type="float" office:value="2020" calcext:value-type="float">
            <text:p>2020</text:p>
          </table:table-cell>
          <table:table-cell table:style-name="ce218" table:formula="of:=+[$DEMANDA.F58]" office:value-type="float" office:value="42349.73991228" calcext:value-type="float">
            <text:p>42,350</text:p>
          </table:table-cell>
          <table:table-cell table:style-name="ce218" table:formula="of:=+[$OFERTA.AC49]" office:value-type="float" office:value="15043.18" calcext:value-type="float">
            <text:p>15,043</text:p>
          </table:table-cell>
          <table:table-cell table:style-name="ce218" table:formula="of:=[.B3]-[.C3]" office:value-type="float" office:value="27306.5599122799" calcext:value-type="float">
            <text:p>27,307</text:p>
          </table:table-cell>
          <table:table-cell table:number-columns-repeated="16380"/>
        </table:table-row>
        <table:table-row table:style-name="ro25">
          <table:table-cell table:style-name="ce215" table:formula="of:=+['file:///home/achalmaedison/Documentos/gestion%20empresarial/planes%20de%20negocio/ganadores%20categoria%20a%20procompite%202020/02%20asociacion%20pamparque%20puquio%20cuy/ANALISIS%20TECNICO%20FINANCIERO.xls'#$OFERTA.P38]" office:value-type="float" office:value="2021" calcext:value-type="float">
            <text:p>2021</text:p>
          </table:table-cell>
          <table:table-cell table:style-name="ce218" table:formula="of:=+[$DEMANDA.F59]" office:value-type="float" office:value="42357.0622136498" calcext:value-type="float">
            <text:p>42,357</text:p>
          </table:table-cell>
          <table:table-cell table:style-name="ce218" table:formula="of:=+[$OFERTA.AC50]" office:value-type="float" office:value="15216.2" calcext:value-type="float">
            <text:p>15,216</text:p>
          </table:table-cell>
          <table:table-cell table:style-name="ce218" table:formula="of:=[.B4]-[.C4]" office:value-type="float" office:value="27140.8622136498" calcext:value-type="float">
            <text:p>27,141</text:p>
          </table:table-cell>
          <table:table-cell table:number-columns-repeated="16380"/>
        </table:table-row>
        <table:table-row table:style-name="ro25">
          <table:table-cell table:style-name="ce215" table:formula="of:=+['file:///home/achalmaedison/Documentos/gestion%20empresarial/planes%20de%20negocio/ganadores%20categoria%20a%20procompite%202020/02%20asociacion%20pamparque%20puquio%20cuy/ANALISIS%20TECNICO%20FINANCIERO.xls'#$OFERTA.P39]" office:value-type="float" office:value="2022" calcext:value-type="float">
            <text:p>2022</text:p>
          </table:table-cell>
          <table:table-cell table:style-name="ce218" table:formula="of:=+[$DEMANDA.F60]" office:value-type="float" office:value="42364.385781051" calcext:value-type="float">
            <text:p>42,364</text:p>
          </table:table-cell>
          <table:table-cell table:style-name="ce218" table:formula="of:=+[$OFERTA.AC51]" office:value-type="float" office:value="15389.22" calcext:value-type="float">
            <text:p>15,389</text:p>
          </table:table-cell>
          <table:table-cell table:style-name="ce218" table:formula="of:=[.B5]-[.C5]" office:value-type="float" office:value="26975.165781051" calcext:value-type="float">
            <text:p>26,975</text:p>
          </table:table-cell>
        </table:table-row>
        <table:table-row table:style-name="ro25">
          <table:table-cell table:style-name="ce215" table:formula="of:=+['file:///home/achalmaedison/Documentos/gestion%20empresarial/planes%20de%20negocio/ganadores%20categoria%20a%20procompite%202020/02%20asociacion%20pamparque%20puquio%20cuy/ANALISIS%20TECNICO%20FINANCIERO.xls'#$OFERTA.P40]" office:value-type="float" office:value="2023" calcext:value-type="float">
            <text:p>2023</text:p>
          </table:table-cell>
          <table:table-cell table:style-name="ce218" table:formula="of:=+[$DEMANDA.F61]" office:value-type="float" office:value="42371.7106147024" calcext:value-type="float">
            <text:p>42,372</text:p>
          </table:table-cell>
          <table:table-cell table:style-name="ce218" table:formula="of:=+[$OFERTA.AC52]" office:value-type="float" office:value="15562.24" calcext:value-type="float">
            <text:p>15,562</text:p>
          </table:table-cell>
          <table:table-cell table:style-name="ce218" table:formula="of:=[.B6]-[.C6]" office:value-type="float" office:value="26809.4706147024" calcext:value-type="float">
            <text:p>26,809</text:p>
          </table:table-cell>
          <table:table-cell table:number-columns-repeated="16380"/>
        </table:table-row>
        <table:table-row table:style-name="ro25">
          <table:table-cell table:style-name="ce215" table:formula="of:=+['file:///home/achalmaedison/Documentos/gestion%20empresarial/planes%20de%20negocio/ganadores%20categoria%20a%20procompite%202020/02%20asociacion%20pamparque%20puquio%20cuy/ANALISIS%20TECNICO%20FINANCIERO.xls'#$OFERTA.P41]" office:value-type="float" office:value="2024" calcext:value-type="float">
            <text:p>2024</text:p>
          </table:table-cell>
          <table:table-cell table:style-name="ce218" table:formula="of:=+[$DEMANDA.F62]" office:value-type="float" office:value="42379.036714823" calcext:value-type="float">
            <text:p>42,379</text:p>
          </table:table-cell>
          <table:table-cell table:style-name="ce218" table:formula="of:=+[$OFERTA.AC53]" office:value-type="float" office:value="15735.26" calcext:value-type="float">
            <text:p>15,735</text:p>
          </table:table-cell>
          <table:table-cell table:style-name="ce218" table:formula="of:=[.B7]-[.C7]" office:value-type="float" office:value="26643.776714823" calcext:value-type="float">
            <text:p>26,644</text:p>
          </table:table-cell>
          <table:table-cell table:number-columns-repeated="16380"/>
        </table:table-row>
        <table:table-row table:style-name="ro25">
          <table:table-cell table:style-name="ce215" table:formula="of:=+['file:///home/achalmaedison/Documentos/gestion%20empresarial/planes%20de%20negocio/ganadores%20categoria%20a%20procompite%202020/02%20asociacion%20pamparque%20puquio%20cuy/ANALISIS%20TECNICO%20FINANCIERO.xls'#$OFERTA.P42]" office:value-type="float" office:value="2025" calcext:value-type="float">
            <text:p>2025</text:p>
          </table:table-cell>
          <table:table-cell table:style-name="ce218" table:formula="of:=+[$DEMANDA.F63]" office:value-type="float" office:value="42386.3640816317" calcext:value-type="float">
            <text:p>42,386</text:p>
          </table:table-cell>
          <table:table-cell table:style-name="ce218" table:formula="of:=+[$OFERTA.AC54]" office:value-type="float" office:value="15908.28" calcext:value-type="float">
            <text:p>15,908</text:p>
          </table:table-cell>
          <table:table-cell table:style-name="ce218" table:formula="of:=[.B8]-[.C8]" office:value-type="float" office:value="26478.0840816317" calcext:value-type="float">
            <text:p>26,478</text:p>
          </table:table-cell>
          <table:table-cell table:number-columns-repeated="16380"/>
        </table:table-row>
        <table:table-row table:style-name="ro25">
          <table:table-cell table:style-name="ce216" office:value-type="string" calcext:value-type="string" table:number-columns-spanned="4" table:number-rows-spanned="1">
            <text:p>FUENTE:Elaboración Propia</text:p>
          </table:table-cell>
          <table:covered-table-cell table:number-columns-repeated="3" table:style-name="ce219"/>
          <table:table-cell table:number-columns-repeated="16380"/>
        </table:table-row>
        <table:table-row table:style-name="ro25" table:number-rows-repeated="1048566">
          <table:table-cell table:number-columns-repeated="16384"/>
        </table:table-row>
        <table:table-row table:style-name="ro25">
          <table:table-cell table:number-columns-repeated="16384"/>
        </table:table-row>
      </table:table>
      <table:table table:name="PLAN DE PRODUCCION" table:style-name="ta5" table:print-ranges="'PLAN DE PRODUCCION'.A1:'PLAN DE PRODUCCION'.U27">
        <table:table-column table:style-name="co41" table:default-cell-style-name="ce220"/>
        <table:table-column table:style-name="co28" table:default-cell-style-name="ce220"/>
        <table:table-column table:style-name="co42" table:default-cell-style-name="ce220"/>
        <table:table-column table:style-name="co39" table:default-cell-style-name="ce220"/>
        <table:table-column table:style-name="co13" table:default-cell-style-name="ce220"/>
        <table:table-column table:style-name="co43" table:default-cell-style-name="ce220"/>
        <table:table-column table:style-name="co12" table:default-cell-style-name="ce220"/>
        <table:table-column table:style-name="co44" table:default-cell-style-name="ce220"/>
        <table:table-column table:style-name="co45" table:number-columns-repeated="12" table:default-cell-style-name="ce220"/>
        <table:table-column table:style-name="co1" table:number-columns-repeated="16364" table:default-cell-style-name="ce220"/>
        <table:table-row table:style-name="ro26">
          <table:table-cell table:number-columns-repeated="16384"/>
        </table:table-row>
        <table:table-row table:style-name="ro27">
          <table:table-cell/>
          <table:table-cell table:style-name="ce222" office:value-type="string" calcext:value-type="string">
            <text:p>AÑOS</text:p>
          </table:table-cell>
          <table:table-cell table:style-name="ce226" office:value-type="string" calcext:value-type="string">
            <text:p>PRODUCCION (UND)</text:p>
          </table:table-cell>
          <table:table-cell table:number-columns-repeated="16381"/>
        </table:table-row>
        <table:table-row table:style-name="ro26" table:visibility="collapse">
          <table:table-cell/>
          <table:table-cell table:style-name="ce223" table:formula="of:=+brecha!#ref!" office:value-type="string" office:string-value="" calcext:value-type="error">
            <text:p>#¿NOMBRE?</text:p>
          </table:table-cell>
          <table:table-cell table:style-name="ce228" table:formula="of:=+#REF!" office:value-type="string" office:string-value="" calcext:value-type="error">
            <text:p>#¡REF!</text:p>
          </table:table-cell>
          <table:table-cell table:number-columns-repeated="16381"/>
        </table:table-row>
        <table:table-row table:style-name="ro26">
          <table:table-cell/>
          <table:table-cell table:style-name="ce224" table:formula="of:=+[$BRECHA.A4]" office:value-type="float" office:value="2021" calcext:value-type="float">
            <text:p>2021</text:p>
          </table:table-cell>
          <table:table-cell table:style-name="ce229" table:formula="of:=+[$OFERTA.Q38]" office:value-type="float" office:value="3185.70442141921" calcext:value-type="float">
            <text:p>3,186</text:p>
          </table:table-cell>
          <table:table-cell table:number-columns-repeated="16381"/>
        </table:table-row>
        <table:table-row table:style-name="ro26">
          <table:table-cell/>
          <table:table-cell table:style-name="ce224" table:formula="of:=+[$BRECHA.A5]" office:value-type="float" office:value="2022" calcext:value-type="float">
            <text:p>2022</text:p>
          </table:table-cell>
          <table:table-cell table:style-name="ce229" table:formula="of:=+[$OFERTA.Q39]" office:value-type="float" office:value="11443.696" calcext:value-type="float">
            <text:p>11,444</text:p>
          </table:table-cell>
          <table:table-cell table:number-columns-repeated="16381"/>
        </table:table-row>
        <table:table-row table:style-name="ro26">
          <table:table-cell/>
          <table:table-cell table:style-name="ce224" table:formula="of:=+[$BRECHA.A6]" office:value-type="float" office:value="2023" calcext:value-type="float">
            <text:p>2023</text:p>
          </table:table-cell>
          <table:table-cell table:style-name="ce229" table:formula="of:=+[$OFERTA.Q40]" office:value-type="float" office:value="11443.696" calcext:value-type="float">
            <text:p>11,444</text:p>
          </table:table-cell>
          <table:table-cell table:number-columns-repeated="16381"/>
        </table:table-row>
        <table:table-row table:style-name="ro26">
          <table:table-cell/>
          <table:table-cell table:style-name="ce224" table:formula="of:=+[$BRECHA.A7]" office:value-type="float" office:value="2024" calcext:value-type="float">
            <text:p>2024</text:p>
          </table:table-cell>
          <table:table-cell table:style-name="ce229" table:formula="of:=+[$OFERTA.Q41]" office:value-type="float" office:value="11443.696" calcext:value-type="float">
            <text:p>11,444</text:p>
          </table:table-cell>
          <table:table-cell table:number-columns-repeated="16381"/>
        </table:table-row>
        <table:table-row table:style-name="ro26">
          <table:table-cell/>
          <table:table-cell table:style-name="ce224" table:formula="of:=+[$BRECHA.A8]" office:value-type="float" office:value="2025" calcext:value-type="float">
            <text:p>2025</text:p>
          </table:table-cell>
          <table:table-cell table:style-name="ce229" table:formula="of:=+[$OFERTA.Q42]" office:value-type="float" office:value="11443.696" calcext:value-type="float">
            <text:p>11,444</text:p>
          </table:table-cell>
          <table:table-cell table:number-columns-repeated="2"/>
          <table:table-cell table:style-name="ce236"/>
          <table:table-cell table:number-columns-repeated="16378"/>
        </table:table-row>
        <table:table-row table:style-name="ro26">
          <table:table-cell table:number-columns-repeated="5"/>
          <table:table-cell table:style-name="ce236"/>
          <table:table-cell table:number-columns-repeated="16378"/>
        </table:table-row>
        <table:table-row table:style-name="ro26">
          <table:table-cell table:number-columns-repeated="16384"/>
        </table:table-row>
        <table:table-row table:style-name="ro26">
          <table:table-cell table:style-name="ce221"/>
          <table:table-cell table:style-name="ce225" office:value-type="string" calcext:value-type="string" table:number-columns-spanned="4" table:number-rows-spanned="1">
            <text:p><text:s text:c="3"/>PLAN DE PRODUCCION DEL CUY</text:p>
          </table:table-cell>
          <table:covered-table-cell table:number-columns-repeated="3" table:style-name="ce225"/>
          <table:table-cell/>
          <table:table-cell table:style-name="ce221" table:number-columns-repeated="16378"/>
        </table:table-row>
        <table:table-row table:style-name="ro28">
          <table:table-cell table:style-name="ce221"/>
          <table:table-cell table:style-name="ce226" office:value-type="string" calcext:value-type="string">
            <text:p>AÑOS</text:p>
          </table:table-cell>
          <table:table-cell table:style-name="ce226" office:value-type="string" calcext:value-type="string">
            <text:p>DEMANDA INSATISFECHA </text:p>
          </table:table-cell>
          <table:table-cell table:style-name="ce226" office:value-type="string" calcext:value-type="string">
            <text:p>PRODUCCION</text:p>
          </table:table-cell>
          <table:table-cell table:style-name="ce226" office:value-type="string" calcext:value-type="string">
            <text:p>COBERTURA</text:p>
          </table:table-cell>
          <table:table-cell table:style-name="ce221"/>
          <table:table-cell table:style-name="ce227" office:value-type="string" calcext:value-type="string">
            <text:p>AÑOS</text:p>
          </table:table-cell>
          <table:table-cell table:style-name="ce227" office:value-type="string" calcext:value-type="string">
            <text:p>PRODUCCION (UND.)</text:p>
          </table:table-cell>
          <table:table-cell table:style-name="ce227" office:value-type="string" calcext:value-type="string">
            <text:p>Ene</text:p>
          </table:table-cell>
          <table:table-cell table:style-name="ce227" office:value-type="string" calcext:value-type="string">
            <text:p>Feb</text:p>
          </table:table-cell>
          <table:table-cell table:style-name="ce227" office:value-type="string" calcext:value-type="string">
            <text:p>Mar</text:p>
          </table:table-cell>
          <table:table-cell table:style-name="ce227" office:value-type="string" calcext:value-type="string">
            <text:p>Abr</text:p>
          </table:table-cell>
          <table:table-cell table:style-name="ce227" office:value-type="string" calcext:value-type="string">
            <text:p>May</text:p>
          </table:table-cell>
          <table:table-cell table:style-name="ce227" office:value-type="string" calcext:value-type="string">
            <text:p>Jun</text:p>
          </table:table-cell>
          <table:table-cell table:style-name="ce227" office:value-type="string" calcext:value-type="string">
            <text:p>Jul</text:p>
          </table:table-cell>
          <table:table-cell table:style-name="ce227" office:value-type="string" calcext:value-type="string">
            <text:p>Ago</text:p>
          </table:table-cell>
          <table:table-cell table:style-name="ce227" office:value-type="string" calcext:value-type="string">
            <text:p>Sep</text:p>
          </table:table-cell>
          <table:table-cell table:style-name="ce227" office:value-type="string" calcext:value-type="string">
            <text:p>Oct</text:p>
          </table:table-cell>
          <table:table-cell table:style-name="ce227" office:value-type="string" calcext:value-type="string">
            <text:p>Nov</text:p>
          </table:table-cell>
          <table:table-cell table:style-name="ce227" office:value-type="string" calcext:value-type="string">
            <text:p>Dic</text:p>
          </table:table-cell>
          <table:table-cell table:style-name="ce221" table:number-columns-repeated="16364"/>
        </table:table-row>
        <table:table-row table:style-name="ro26" table:visibility="collapse">
          <table:table-cell/>
          <table:table-cell table:style-name="ce224" table:formula="of:=+[.B3]" office:value-type="string" office:string-value="" calcext:value-type="error">
            <text:p>#¿NOMBRE?</text:p>
          </table:table-cell>
          <table:table-cell table:style-name="ce230" table:formula="of:=+brecha!#ref!" office:value-type="string" office:string-value="" calcext:value-type="error">
            <text:p>#¿NOMBRE?</text:p>
          </table:table-cell>
          <table:table-cell table:style-name="ce232" table:formula="of:=[.C3]" office:value-type="string" office:string-value="" calcext:value-type="error">
            <text:p>#¡REF!</text:p>
          </table:table-cell>
          <table:table-cell table:style-name="ce235" table:formula="of:=[.D13]/[.C13]" office:value-type="string" office:string-value="" calcext:value-type="error">
            <text:p>#¿NOMBRE?</text:p>
          </table:table-cell>
          <table:table-cell/>
          <table:table-cell table:style-name="ce224" table:formula="of:=+[.B13]" office:value-type="string" office:string-value="" calcext:value-type="error">
            <text:p>#¿NOMBRE?</text:p>
          </table:table-cell>
          <table:table-cell table:style-name="ce230" table:formula="of:=SUM([.I13:.T13])" office:value-type="string" office:string-value="" calcext:value-type="error">
            <text:p>#¡REF!</text:p>
          </table:table-cell>
          <table:table-cell table:style-name="ce238" table:formula="of:=[.C3]/12" office:value-type="string" office:string-value="" calcext:value-type="error">
            <text:p>#¡REF!</text:p>
          </table:table-cell>
          <table:table-cell table:style-name="ce238" table:formula="of:=[.$I$13]" office:value-type="string" office:string-value="" calcext:value-type="error">
            <text:p>#¡REF!</text:p>
          </table:table-cell>
          <table:table-cell table:style-name="ce238" table:formula="of:=[.$I$13]" office:value-type="string" office:string-value="" calcext:value-type="error">
            <text:p>#¡REF!</text:p>
          </table:table-cell>
          <table:table-cell table:style-name="ce238" table:formula="of:=[.$I$13]" office:value-type="string" office:string-value="" calcext:value-type="error">
            <text:p>#¡REF!</text:p>
          </table:table-cell>
          <table:table-cell table:style-name="ce238" table:formula="of:=[.$I$13]" office:value-type="string" office:string-value="" calcext:value-type="error">
            <text:p>#¡REF!</text:p>
          </table:table-cell>
          <table:table-cell table:style-name="ce238" table:formula="of:=[.$I$13]" office:value-type="string" office:string-value="" calcext:value-type="error">
            <text:p>#¡REF!</text:p>
          </table:table-cell>
          <table:table-cell table:style-name="ce238" table:formula="of:=[.$I$13]" office:value-type="string" office:string-value="" calcext:value-type="error">
            <text:p>#¡REF!</text:p>
          </table:table-cell>
          <table:table-cell table:style-name="ce238" table:formula="of:=[.$I$13]" office:value-type="string" office:string-value="" calcext:value-type="error">
            <text:p>#¡REF!</text:p>
          </table:table-cell>
          <table:table-cell table:style-name="ce238" table:formula="of:=[.$I$13]" office:value-type="string" office:string-value="" calcext:value-type="error">
            <text:p>#¡REF!</text:p>
          </table:table-cell>
          <table:table-cell table:style-name="ce238" table:formula="of:=[.$I$13]" office:value-type="string" office:string-value="" calcext:value-type="error">
            <text:p>#¡REF!</text:p>
          </table:table-cell>
          <table:table-cell table:style-name="ce238" table:formula="of:=[.$I$13]" office:value-type="string" office:string-value="" calcext:value-type="error">
            <text:p>#¡REF!</text:p>
          </table:table-cell>
          <table:table-cell table:style-name="ce238" table:formula="of:=[.$I$13]" office:value-type="string" office:string-value="" calcext:value-type="error">
            <text:p>#¡REF!</text:p>
          </table:table-cell>
          <table:table-cell table:number-columns-repeated="16364"/>
        </table:table-row>
        <table:table-row table:style-name="ro26">
          <table:table-cell/>
          <table:table-cell table:style-name="ce224" table:formula="of:=+[.B4]" office:value-type="float" office:value="2021" calcext:value-type="float">
            <text:p>2021</text:p>
          </table:table-cell>
          <table:table-cell table:style-name="ce229" table:formula="of:=+[$BRECHA.D4]" office:value-type="float" office:value="27140.8622136498" calcext:value-type="float">
            <text:p>27,141</text:p>
          </table:table-cell>
          <table:table-cell table:style-name="ce233" table:formula="of:=[.C4]" office:value-type="float" office:value="3185.70442141921" calcext:value-type="float">
            <text:p>3186</text:p>
          </table:table-cell>
          <table:table-cell table:style-name="ce235" table:formula="of:=[.D14]/[.C14]" office:value-type="percentage" office:value="0.11737668451141" calcext:value-type="percentage">
            <text:p>11.74 %</text:p>
          </table:table-cell>
          <table:table-cell/>
          <table:table-cell table:style-name="ce224" table:formula="of:=+[.B14]" office:value-type="float" office:value="2021" calcext:value-type="float">
            <text:p>2021</text:p>
          </table:table-cell>
          <table:table-cell table:style-name="ce231" table:formula="of:=SUM([.I14:.T14])" office:value-type="float" office:value="3185.70442141921" calcext:value-type="float">
            <text:p>3,186</text:p>
          </table:table-cell>
          <table:table-cell table:style-name="ce239" table:formula="of:=[.C4]/12" office:value-type="float" office:value="265.475368451601" calcext:value-type="float">
            <text:p>265</text:p>
          </table:table-cell>
          <table:table-cell table:style-name="ce239" table:formula="of:=[.$I$14]" office:value-type="float" office:value="265.475368451601" calcext:value-type="float">
            <text:p>265</text:p>
          </table:table-cell>
          <table:table-cell table:style-name="ce239" table:formula="of:=[.$I$14]" office:value-type="float" office:value="265.475368451601" calcext:value-type="float">
            <text:p>265</text:p>
          </table:table-cell>
          <table:table-cell table:style-name="ce239" table:formula="of:=[.$I$14]" office:value-type="float" office:value="265.475368451601" calcext:value-type="float">
            <text:p>265</text:p>
          </table:table-cell>
          <table:table-cell table:style-name="ce239" table:formula="of:=[.$I$14]" office:value-type="float" office:value="265.475368451601" calcext:value-type="float">
            <text:p>265</text:p>
          </table:table-cell>
          <table:table-cell table:style-name="ce239" table:formula="of:=[.$I$14]" office:value-type="float" office:value="265.475368451601" calcext:value-type="float">
            <text:p>265</text:p>
          </table:table-cell>
          <table:table-cell table:style-name="ce239" table:formula="of:=[.$I$14]" office:value-type="float" office:value="265.475368451601" calcext:value-type="float">
            <text:p>265</text:p>
          </table:table-cell>
          <table:table-cell table:style-name="ce239" table:formula="of:=[.$I$14]" office:value-type="float" office:value="265.475368451601" calcext:value-type="float">
            <text:p>265</text:p>
          </table:table-cell>
          <table:table-cell table:style-name="ce239" table:formula="of:=[.$I$14]" office:value-type="float" office:value="265.475368451601" calcext:value-type="float">
            <text:p>265</text:p>
          </table:table-cell>
          <table:table-cell table:style-name="ce239" table:formula="of:=[.$I$14]" office:value-type="float" office:value="265.475368451601" calcext:value-type="float">
            <text:p>265</text:p>
          </table:table-cell>
          <table:table-cell table:style-name="ce239" table:formula="of:=[.$I$14]" office:value-type="float" office:value="265.475368451601" calcext:value-type="float">
            <text:p>265</text:p>
          </table:table-cell>
          <table:table-cell table:style-name="ce239" table:formula="of:=[.$I$14]" office:value-type="float" office:value="265.475368451601" calcext:value-type="float">
            <text:p>265</text:p>
          </table:table-cell>
          <table:table-cell table:number-columns-repeated="16364"/>
        </table:table-row>
        <table:table-row table:style-name="ro26">
          <table:table-cell/>
          <table:table-cell table:style-name="ce224" table:formula="of:=+[.B5]" office:value-type="float" office:value="2022" calcext:value-type="float">
            <text:p>2022</text:p>
          </table:table-cell>
          <table:table-cell table:style-name="ce229" table:formula="of:=+[$BRECHA.D5]" office:value-type="float" office:value="26975.165781051" calcext:value-type="float">
            <text:p>26,975</text:p>
          </table:table-cell>
          <table:table-cell table:style-name="ce233" table:formula="of:=[.C5]" office:value-type="float" office:value="11443.696" calcext:value-type="float">
            <text:p>11444</text:p>
          </table:table-cell>
          <table:table-cell table:style-name="ce235" table:formula="of:=[.D15]/[.C15]" office:value-type="percentage" office:value="0.424230794089827" calcext:value-type="percentage">
            <text:p>42.42 %</text:p>
          </table:table-cell>
          <table:table-cell/>
          <table:table-cell table:style-name="ce224" table:formula="of:=+[.B15]" office:value-type="float" office:value="2022" calcext:value-type="float">
            <text:p>2022</text:p>
          </table:table-cell>
          <table:table-cell table:style-name="ce231" table:formula="of:=SUM([.I15:.T15])" office:value-type="float" office:value="11443.696" calcext:value-type="float">
            <text:p>11,444</text:p>
          </table:table-cell>
          <table:table-cell table:style-name="ce239" table:formula="of:=[.C5]/12" office:value-type="float" office:value="953.641333333333" calcext:value-type="float">
            <text:p>954</text:p>
          </table:table-cell>
          <table:table-cell table:style-name="ce239" table:formula="of:=[.$I$15]" office:value-type="float" office:value="953.641333333333" calcext:value-type="float">
            <text:p>954</text:p>
          </table:table-cell>
          <table:table-cell table:style-name="ce239" table:formula="of:=[.$I$15]" office:value-type="float" office:value="953.641333333333" calcext:value-type="float">
            <text:p>954</text:p>
          </table:table-cell>
          <table:table-cell table:style-name="ce239" table:formula="of:=[.$I$15]" office:value-type="float" office:value="953.641333333333" calcext:value-type="float">
            <text:p>954</text:p>
          </table:table-cell>
          <table:table-cell table:style-name="ce239" table:formula="of:=[.$I$15]" office:value-type="float" office:value="953.641333333333" calcext:value-type="float">
            <text:p>954</text:p>
          </table:table-cell>
          <table:table-cell table:style-name="ce239" table:formula="of:=[.$I$15]" office:value-type="float" office:value="953.641333333333" calcext:value-type="float">
            <text:p>954</text:p>
          </table:table-cell>
          <table:table-cell table:style-name="ce239" table:formula="of:=[.$I$15]" office:value-type="float" office:value="953.641333333333" calcext:value-type="float">
            <text:p>954</text:p>
          </table:table-cell>
          <table:table-cell table:style-name="ce239" table:formula="of:=[.$I$15]" office:value-type="float" office:value="953.641333333333" calcext:value-type="float">
            <text:p>954</text:p>
          </table:table-cell>
          <table:table-cell table:style-name="ce239" table:formula="of:=[.$I$15]" office:value-type="float" office:value="953.641333333333" calcext:value-type="float">
            <text:p>954</text:p>
          </table:table-cell>
          <table:table-cell table:style-name="ce239" table:formula="of:=[.$I$15]" office:value-type="float" office:value="953.641333333333" calcext:value-type="float">
            <text:p>954</text:p>
          </table:table-cell>
          <table:table-cell table:style-name="ce239" table:formula="of:=[.$I$15]" office:value-type="float" office:value="953.641333333333" calcext:value-type="float">
            <text:p>954</text:p>
          </table:table-cell>
          <table:table-cell table:style-name="ce239" table:formula="of:=[.$I$15]" office:value-type="float" office:value="953.641333333333" calcext:value-type="float">
            <text:p>954</text:p>
          </table:table-cell>
          <table:table-cell table:number-columns-repeated="16364"/>
        </table:table-row>
        <table:table-row table:style-name="ro26">
          <table:table-cell/>
          <table:table-cell table:style-name="ce224" table:formula="of:=+[.B6]" office:value-type="float" office:value="2023" calcext:value-type="float">
            <text:p>2023</text:p>
          </table:table-cell>
          <table:table-cell table:style-name="ce229" table:formula="of:=+[$BRECHA.D6]" office:value-type="float" office:value="26809.4706147024" calcext:value-type="float">
            <text:p>26,809</text:p>
          </table:table-cell>
          <table:table-cell table:style-name="ce233" table:formula="of:=[.C6]" office:value-type="float" office:value="11443.696" calcext:value-type="float">
            <text:p>11444</text:p>
          </table:table-cell>
          <table:table-cell table:style-name="ce235" table:formula="of:=[.D16]/[.C16]" office:value-type="percentage" office:value="0.42685274037915" calcext:value-type="percentage">
            <text:p>42.69 %</text:p>
          </table:table-cell>
          <table:table-cell/>
          <table:table-cell table:style-name="ce224" table:formula="of:=+[.B16]" office:value-type="float" office:value="2023" calcext:value-type="float">
            <text:p>2023</text:p>
          </table:table-cell>
          <table:table-cell table:style-name="ce231" table:formula="of:=SUM([.I16:.T16])" office:value-type="float" office:value="11443.696" calcext:value-type="float">
            <text:p>11,444</text:p>
          </table:table-cell>
          <table:table-cell table:style-name="ce239" table:formula="of:=[.C6]/12" office:value-type="float" office:value="953.641333333333" calcext:value-type="float">
            <text:p>954</text:p>
          </table:table-cell>
          <table:table-cell table:style-name="ce239" table:formula="of:=[.$I$16]" office:value-type="float" office:value="953.641333333333" calcext:value-type="float">
            <text:p>954</text:p>
          </table:table-cell>
          <table:table-cell table:style-name="ce239" table:formula="of:=[.$I$16]" office:value-type="float" office:value="953.641333333333" calcext:value-type="float">
            <text:p>954</text:p>
          </table:table-cell>
          <table:table-cell table:style-name="ce239" table:formula="of:=[.$I$16]" office:value-type="float" office:value="953.641333333333" calcext:value-type="float">
            <text:p>954</text:p>
          </table:table-cell>
          <table:table-cell table:style-name="ce239" table:formula="of:=[.$I$16]" office:value-type="float" office:value="953.641333333333" calcext:value-type="float">
            <text:p>954</text:p>
          </table:table-cell>
          <table:table-cell table:style-name="ce239" table:formula="of:=[.$I$16]" office:value-type="float" office:value="953.641333333333" calcext:value-type="float">
            <text:p>954</text:p>
          </table:table-cell>
          <table:table-cell table:style-name="ce239" table:formula="of:=[.$I$16]" office:value-type="float" office:value="953.641333333333" calcext:value-type="float">
            <text:p>954</text:p>
          </table:table-cell>
          <table:table-cell table:style-name="ce239" table:formula="of:=[.$I$16]" office:value-type="float" office:value="953.641333333333" calcext:value-type="float">
            <text:p>954</text:p>
          </table:table-cell>
          <table:table-cell table:style-name="ce239" table:formula="of:=[.$I$16]" office:value-type="float" office:value="953.641333333333" calcext:value-type="float">
            <text:p>954</text:p>
          </table:table-cell>
          <table:table-cell table:style-name="ce239" table:formula="of:=[.$I$16]" office:value-type="float" office:value="953.641333333333" calcext:value-type="float">
            <text:p>954</text:p>
          </table:table-cell>
          <table:table-cell table:style-name="ce239" table:formula="of:=[.$I$16]" office:value-type="float" office:value="953.641333333333" calcext:value-type="float">
            <text:p>954</text:p>
          </table:table-cell>
          <table:table-cell table:style-name="ce239" table:formula="of:=[.$I$16]" office:value-type="float" office:value="953.641333333333" calcext:value-type="float">
            <text:p>954</text:p>
          </table:table-cell>
          <table:table-cell table:number-columns-repeated="16364"/>
        </table:table-row>
        <table:table-row table:style-name="ro26">
          <table:table-cell/>
          <table:table-cell table:style-name="ce224" table:formula="of:=+[.B7]" office:value-type="float" office:value="2024" calcext:value-type="float">
            <text:p>2024</text:p>
          </table:table-cell>
          <table:table-cell table:style-name="ce229" table:formula="of:=+[$BRECHA.D7]" office:value-type="float" office:value="26643.776714823" calcext:value-type="float">
            <text:p>26,644</text:p>
          </table:table-cell>
          <table:table-cell table:style-name="ce233" table:formula="of:=[.D16]" office:value-type="float" office:value="11443.696" calcext:value-type="float">
            <text:p>11444</text:p>
          </table:table-cell>
          <table:table-cell table:style-name="ce235" table:formula="of:=[.D17]/[.C17]" office:value-type="percentage" office:value="0.429507277533723" calcext:value-type="percentage">
            <text:p>42.95 %</text:p>
          </table:table-cell>
          <table:table-cell/>
          <table:table-cell table:style-name="ce224" table:formula="of:=+[.B17]" office:value-type="float" office:value="2024" calcext:value-type="float">
            <text:p>2024</text:p>
          </table:table-cell>
          <table:table-cell table:style-name="ce231" table:formula="of:=SUM([.I17:.T17])" office:value-type="float" office:value="11443.696" calcext:value-type="float">
            <text:p>11,444</text:p>
          </table:table-cell>
          <table:table-cell table:style-name="ce239" table:formula="of:=[.C7]/12" office:value-type="float" office:value="953.641333333333" calcext:value-type="float">
            <text:p>954</text:p>
          </table:table-cell>
          <table:table-cell table:style-name="ce239" table:formula="of:=[.$I$17]" office:value-type="float" office:value="953.641333333333" calcext:value-type="float">
            <text:p>954</text:p>
          </table:table-cell>
          <table:table-cell table:style-name="ce239" table:formula="of:=[.$I$17]" office:value-type="float" office:value="953.641333333333" calcext:value-type="float">
            <text:p>954</text:p>
          </table:table-cell>
          <table:table-cell table:style-name="ce239" table:formula="of:=[.$I$17]" office:value-type="float" office:value="953.641333333333" calcext:value-type="float">
            <text:p>954</text:p>
          </table:table-cell>
          <table:table-cell table:style-name="ce239" table:formula="of:=[.$I$17]" office:value-type="float" office:value="953.641333333333" calcext:value-type="float">
            <text:p>954</text:p>
          </table:table-cell>
          <table:table-cell table:style-name="ce239" table:formula="of:=[.$I$17]" office:value-type="float" office:value="953.641333333333" calcext:value-type="float">
            <text:p>954</text:p>
          </table:table-cell>
          <table:table-cell table:style-name="ce239" table:formula="of:=[.$I$17]" office:value-type="float" office:value="953.641333333333" calcext:value-type="float">
            <text:p>954</text:p>
          </table:table-cell>
          <table:table-cell table:style-name="ce239" table:formula="of:=[.$I$17]" office:value-type="float" office:value="953.641333333333" calcext:value-type="float">
            <text:p>954</text:p>
          </table:table-cell>
          <table:table-cell table:style-name="ce239" table:formula="of:=[.$I$17]" office:value-type="float" office:value="953.641333333333" calcext:value-type="float">
            <text:p>954</text:p>
          </table:table-cell>
          <table:table-cell table:style-name="ce239" table:formula="of:=[.$I$17]" office:value-type="float" office:value="953.641333333333" calcext:value-type="float">
            <text:p>954</text:p>
          </table:table-cell>
          <table:table-cell table:style-name="ce239" table:formula="of:=[.$I$17]" office:value-type="float" office:value="953.641333333333" calcext:value-type="float">
            <text:p>954</text:p>
          </table:table-cell>
          <table:table-cell table:style-name="ce239" table:formula="of:=[.$I$17]" office:value-type="float" office:value="953.641333333333" calcext:value-type="float">
            <text:p>954</text:p>
          </table:table-cell>
          <table:table-cell table:number-columns-repeated="16364"/>
        </table:table-row>
        <table:table-row table:style-name="ro26">
          <table:table-cell/>
          <table:table-cell table:style-name="ce224" table:formula="of:=+[.B8]" office:value-type="float" office:value="2025" calcext:value-type="float">
            <text:p>2025</text:p>
          </table:table-cell>
          <table:table-cell table:style-name="ce229" table:formula="of:=+[$BRECHA.D8]" office:value-type="float" office:value="26478.0840816317" calcext:value-type="float">
            <text:p>26,478</text:p>
          </table:table-cell>
          <table:table-cell table:style-name="ce233" table:formula="of:=[.D17]" office:value-type="float" office:value="11443.696" calcext:value-type="float">
            <text:p>11444</text:p>
          </table:table-cell>
          <table:table-cell table:style-name="ce235" table:formula="of:=[.D18]/[.C18]" office:value-type="percentage" office:value="0.432195017007998" calcext:value-type="percentage">
            <text:p>43.22 %</text:p>
          </table:table-cell>
          <table:table-cell table:style-name="ce237"/>
          <table:table-cell table:style-name="ce224" table:formula="of:=+[.B18]" office:value-type="float" office:value="2025" calcext:value-type="float">
            <text:p>2025</text:p>
          </table:table-cell>
          <table:table-cell table:style-name="ce231" table:formula="of:=SUM([.I18:.T18])" office:value-type="float" office:value="11443.696" calcext:value-type="float">
            <text:p>11,444</text:p>
          </table:table-cell>
          <table:table-cell table:style-name="ce239" table:formula="of:=[.C8]/12" office:value-type="float" office:value="953.641333333333" calcext:value-type="float">
            <text:p>954</text:p>
          </table:table-cell>
          <table:table-cell table:style-name="ce239" table:formula="of:=[.$I$18]" office:value-type="float" office:value="953.641333333333" calcext:value-type="float">
            <text:p>954</text:p>
          </table:table-cell>
          <table:table-cell table:style-name="ce239" table:formula="of:=[.$I$18]" office:value-type="float" office:value="953.641333333333" calcext:value-type="float">
            <text:p>954</text:p>
          </table:table-cell>
          <table:table-cell table:style-name="ce239" table:formula="of:=[.$I$18]" office:value-type="float" office:value="953.641333333333" calcext:value-type="float">
            <text:p>954</text:p>
          </table:table-cell>
          <table:table-cell table:style-name="ce239" table:formula="of:=[.$I$18]" office:value-type="float" office:value="953.641333333333" calcext:value-type="float">
            <text:p>954</text:p>
          </table:table-cell>
          <table:table-cell table:style-name="ce239" table:formula="of:=[.$I$18]" office:value-type="float" office:value="953.641333333333" calcext:value-type="float">
            <text:p>954</text:p>
          </table:table-cell>
          <table:table-cell table:style-name="ce239" table:formula="of:=[.$I$18]" office:value-type="float" office:value="953.641333333333" calcext:value-type="float">
            <text:p>954</text:p>
          </table:table-cell>
          <table:table-cell table:style-name="ce239" table:formula="of:=[.$I$18]" office:value-type="float" office:value="953.641333333333" calcext:value-type="float">
            <text:p>954</text:p>
          </table:table-cell>
          <table:table-cell table:style-name="ce239" table:formula="of:=[.$I$18]" office:value-type="float" office:value="953.641333333333" calcext:value-type="float">
            <text:p>954</text:p>
          </table:table-cell>
          <table:table-cell table:style-name="ce239" table:formula="of:=[.$I$18]" office:value-type="float" office:value="953.641333333333" calcext:value-type="float">
            <text:p>954</text:p>
          </table:table-cell>
          <table:table-cell table:style-name="ce239" table:formula="of:=[.$I$18]" office:value-type="float" office:value="953.641333333333" calcext:value-type="float">
            <text:p>954</text:p>
          </table:table-cell>
          <table:table-cell table:style-name="ce239" table:formula="of:=[.$I$18]" office:value-type="float" office:value="953.641333333333" calcext:value-type="float">
            <text:p>954</text:p>
          </table:table-cell>
          <table:table-cell table:number-columns-repeated="16364"/>
        </table:table-row>
        <table:table-row table:style-name="ro26">
          <table:table-cell table:number-columns-repeated="16384"/>
        </table:table-row>
        <table:table-row table:style-name="ro23">
          <table:table-cell/>
          <table:table-cell table:style-name="ce227" office:value-type="string" calcext:value-type="string">
            <text:p>Años</text:p>
          </table:table-cell>
          <table:table-cell table:style-name="ce227" office:value-type="string" calcext:value-type="string">
            <text:p>Produccion (UND.)</text:p>
          </table:table-cell>
          <table:table-cell table:style-name="ce227" office:value-type="string" calcext:value-type="string">
            <text:p>Precio por Und (S/.)</text:p>
          </table:table-cell>
          <table:table-cell table:style-name="ce227" office:value-type="string" calcext:value-type="string">
            <text:p>Ventas proyectadas (S/.)</text:p>
          </table:table-cell>
          <table:table-cell table:number-columns-repeated="16379"/>
        </table:table-row>
        <table:table-row table:style-name="ro26" table:visibility="collapse">
          <table:table-cell/>
          <table:table-cell table:style-name="ce224" table:formula="of:=+[.B13]" office:value-type="string" office:string-value="" calcext:value-type="error">
            <text:p>#¿NOMBRE?</text:p>
          </table:table-cell>
          <table:table-cell table:style-name="ce230" table:formula="of:=[.C3]" office:value-type="string" office:string-value="" calcext:value-type="error">
            <text:p>#¡REF!</text:p>
          </table:table-cell>
          <table:table-cell table:style-name="ce230" office:value-type="float" office:value="0" calcext:value-type="float">
            <text:p><text:s/>- <text:s text:c="2"/></text:p>
          </table:table-cell>
          <table:table-cell table:style-name="ce230" table:formula="of:=[.C21]*[.D21]" office:value-type="string" office:string-value="" calcext:value-type="error">
            <text:p>#¡REF!</text:p>
          </table:table-cell>
          <table:table-cell table:number-columns-repeated="16379"/>
        </table:table-row>
        <table:table-row table:style-name="ro26">
          <table:table-cell/>
          <table:table-cell table:style-name="ce224" table:formula="of:=+[.B14]" office:value-type="float" office:value="2021" calcext:value-type="float">
            <text:p>2021</text:p>
          </table:table-cell>
          <table:table-cell table:style-name="ce231" table:formula="of:=[.C4]" office:value-type="float" office:value="3185.70442141921" calcext:value-type="float">
            <text:p>3,186</text:p>
          </table:table-cell>
          <table:table-cell table:style-name="ce234" table:formula="of:=[$INGRESOS.B10]" office:value-type="float" office:value="18" calcext:value-type="float">
            <text:p>18.00</text:p>
          </table:table-cell>
          <table:table-cell table:style-name="ce234" table:formula="of:=[.C22]*[.D22]" office:value-type="float" office:value="57342.6795855458" calcext:value-type="float">
            <text:p>57,342.68</text:p>
          </table:table-cell>
          <table:table-cell table:number-columns-repeated="16379"/>
        </table:table-row>
        <table:table-row table:style-name="ro26">
          <table:table-cell/>
          <table:table-cell table:style-name="ce224" table:formula="of:=+[.B15]" office:value-type="float" office:value="2022" calcext:value-type="float">
            <text:p>2022</text:p>
          </table:table-cell>
          <table:table-cell table:style-name="ce231" table:formula="of:=[.C5]" office:value-type="float" office:value="11443.696" calcext:value-type="float">
            <text:p>11,444</text:p>
          </table:table-cell>
          <table:table-cell table:style-name="ce234" table:formula="of:=[$INGRESOS.C10]" office:value-type="float" office:value="18" calcext:value-type="float">
            <text:p>18.00</text:p>
          </table:table-cell>
          <table:table-cell table:style-name="ce234" table:formula="of:=[.C23]*[.D23]" office:value-type="float" office:value="205986.528" calcext:value-type="float">
            <text:p>205,986.53</text:p>
          </table:table-cell>
          <table:table-cell table:number-columns-repeated="2"/>
          <table:table-cell table:style-name="ce236"/>
          <table:table-cell table:formula="of:=+[.I14]/4" office:value-type="float" office:value="66.3688421129002" calcext:value-type="float">
            <text:p>66.3688421129002</text:p>
          </table:table-cell>
          <table:table-cell table:number-columns-repeated="16375"/>
        </table:table-row>
        <table:table-row table:style-name="ro26">
          <table:table-cell/>
          <table:table-cell table:style-name="ce224" table:formula="of:=+[.B16]" office:value-type="float" office:value="2023" calcext:value-type="float">
            <text:p>2023</text:p>
          </table:table-cell>
          <table:table-cell table:style-name="ce231" table:formula="of:=[.C6]" office:value-type="float" office:value="11443.696" calcext:value-type="float">
            <text:p>11,444</text:p>
          </table:table-cell>
          <table:table-cell table:style-name="ce234" table:formula="of:=[$INGRESOS.D10]" office:value-type="float" office:value="18" calcext:value-type="float">
            <text:p>18.00</text:p>
          </table:table-cell>
          <table:table-cell table:style-name="ce234" table:formula="of:=[.C24]*[.D24]" office:value-type="float" office:value="205986.528" calcext:value-type="float">
            <text:p>205,986.53</text:p>
          </table:table-cell>
          <table:table-cell table:number-columns-repeated="3"/>
          <table:table-cell table:formula="of:=+[.I15]/4" office:value-type="float" office:value="238.410333333333" calcext:value-type="float">
            <text:p>238.410333333333</text:p>
          </table:table-cell>
          <table:table-cell table:number-columns-repeated="16375"/>
        </table:table-row>
        <table:table-row table:style-name="ro26">
          <table:table-cell/>
          <table:table-cell table:style-name="ce224" table:formula="of:=+[.B17]" office:value-type="float" office:value="2024" calcext:value-type="float">
            <text:p>2024</text:p>
          </table:table-cell>
          <table:table-cell table:style-name="ce231" table:formula="of:=[.C7]" office:value-type="float" office:value="11443.696" calcext:value-type="float">
            <text:p>11,444</text:p>
          </table:table-cell>
          <table:table-cell table:style-name="ce234" table:formula="of:=[$INGRESOS.E10]" office:value-type="float" office:value="18" calcext:value-type="float">
            <text:p>18.00</text:p>
          </table:table-cell>
          <table:table-cell table:style-name="ce234" table:formula="of:=[.C25]*[.D25]" office:value-type="float" office:value="205986.528" calcext:value-type="float">
            <text:p>205,986.53</text:p>
          </table:table-cell>
          <table:table-cell table:number-columns-repeated="16379"/>
        </table:table-row>
        <table:table-row table:style-name="ro26">
          <table:table-cell/>
          <table:table-cell table:style-name="ce224" table:formula="of:=+[.B18]" office:value-type="float" office:value="2025" calcext:value-type="float">
            <text:p>2025</text:p>
          </table:table-cell>
          <table:table-cell table:style-name="ce231" table:formula="of:=[.C8]" office:value-type="float" office:value="11443.696" calcext:value-type="float">
            <text:p>11,444</text:p>
          </table:table-cell>
          <table:table-cell table:style-name="ce234" table:formula="of:=[$INGRESOS.F10]" office:value-type="float" office:value="18" calcext:value-type="float">
            <text:p>18.00</text:p>
          </table:table-cell>
          <table:table-cell table:style-name="ce234" table:formula="of:=[.C26]*[.D26]" office:value-type="float" office:value="205986.528" calcext:value-type="float">
            <text:p>205,986.53</text:p>
          </table:table-cell>
          <table:table-cell table:number-columns-repeated="16379"/>
        </table:table-row>
        <table:table-row table:style-name="ro26" table:number-rows-repeated="1048549">
          <table:table-cell table:number-columns-repeated="16384"/>
        </table:table-row>
        <table:table-row table:style-name="ro26">
          <table:table-cell table:number-columns-repeated="16384"/>
        </table:table-row>
        <table:named-expressions>
          <table:named-range table:name="_xlnm.Print_Area" table:base-cell-address="$POBLACION.$A$1" table:cell-range-address="$'PLAN DE PRODUCCION'.$A$1:.$U$27" table:range-usable-as="print-range"/>
        </table:named-expressions>
      </table:table>
      <table:table table:name="TERREN Y OBR CIV" table:style-name="ta6" table:print-ranges="'TERREN Y OBR CIV'.B2:'TERREN Y OBR CIV'.F36">
        <table:table-column table:style-name="co46" table:default-cell-style-name="ce2"/>
        <table:table-column table:style-name="co47" table:default-cell-style-name="ce2"/>
        <table:table-column table:style-name="co48" table:default-cell-style-name="ce253"/>
        <table:table-column table:style-name="co32" table:default-cell-style-name="ce253"/>
        <table:table-column table:style-name="co49" table:default-cell-style-name="ce253"/>
        <table:table-column table:style-name="co50" table:default-cell-style-name="ce253"/>
        <table:table-column table:style-name="co51" table:default-cell-style-name="ce2"/>
        <table:table-column table:style-name="co1" table:number-columns-repeated="3" table:default-cell-style-name="ce2"/>
        <table:table-column table:style-name="co16" table:default-cell-style-name="ce2"/>
        <table:table-column table:style-name="co1" table:number-columns-repeated="2" table:default-cell-style-name="ce2"/>
        <table:table-column table:style-name="co52" table:default-cell-style-name="ce2"/>
        <table:table-column table:style-name="co1" table:number-columns-repeated="16370" table:default-cell-style-name="ce2"/>
        <table:table-row table:style-name="ro1" table:number-rows-repeated="2">
          <table:table-cell/>
          <table:table-cell table:style-name="ce7"/>
          <table:table-cell table:style-name="ce252" table:number-columns-repeated="4"/>
          <table:table-cell table:style-name="ce7"/>
          <table:table-cell table:number-columns-repeated="16377"/>
        </table:table-row>
        <table:table-row table:style-name="ro1">
          <table:table-cell/>
          <table:table-cell table:style-name="ce241" office:value-type="string" calcext:value-type="string">
            <text:p><text:s text:c="71"/>TERRENOS Y OBRAS CIVILES </text:p>
          </table:table-cell>
          <table:table-cell/>
          <table:table-cell table:style-name="ce261" table:number-columns-repeated="2"/>
          <table:table-cell table:style-name="ce252"/>
          <table:table-cell table:style-name="ce7"/>
          <table:table-cell table:number-columns-repeated="16377"/>
        </table:table-row>
        <table:table-row table:style-name="ro29">
          <table:table-cell table:style-name="ce240"/>
          <table:table-cell table:style-name="ce226" office:value-type="string" calcext:value-type="string">
            <text:p><text:s text:c="19"/>CONCEPTO</text:p>
          </table:table-cell>
          <table:table-cell table:style-name="ce226" office:value-type="string" calcext:value-type="string">
            <text:p>UNIDAD</text:p>
          </table:table-cell>
          <table:table-cell table:style-name="ce226" office:value-type="string" calcext:value-type="string">
            <text:p>CANTIDAD</text:p>
          </table:table-cell>
          <table:table-cell table:style-name="ce226" office:value-type="string" calcext:value-type="string">
            <text:p>COSTO UNITARIO</text:p>
          </table:table-cell>
          <table:table-cell table:style-name="ce226" office:value-type="string" calcext:value-type="string">
            <text:p>COSTO TOTAL</text:p>
          </table:table-cell>
          <table:table-cell table:style-name="ce272"/>
          <table:table-cell table:style-name="ce240" table:number-columns-repeated="2"/>
          <table:table-cell table:style-name="ce240" table:formula="of:=183*2" office:value-type="float" office:value="366" calcext:value-type="float">
            <text:p>366</text:p>
          </table:table-cell>
          <table:table-cell table:style-name="ce240" table:formula="of:=+[.J4]/60" office:value-type="float" office:value="6.1" calcext:value-type="float">
            <text:p>6.1</text:p>
          </table:table-cell>
          <table:table-cell table:style-name="ce240" table:number-columns-repeated="16373"/>
        </table:table-row>
        <table:table-row table:style-name="ro1">
          <table:table-cell table:style-name="ce241"/>
          <table:table-cell table:style-name="ce243" office:value-type="string" calcext:value-type="string">
            <text:p>I. TERRENOS</text:p>
          </table:table-cell>
          <table:table-cell table:style-name="ce254" office:value-type="string" calcext:value-type="string">
            <text:p>m2</text:p>
          </table:table-cell>
          <table:table-cell table:style-name="ce262" office:value-type="float" office:value="0" calcext:value-type="float">
            <text:p>0.00</text:p>
          </table:table-cell>
          <table:table-cell table:style-name="ce262" office:value-type="float" office:value="35" calcext:value-type="float">
            <text:p>35.00</text:p>
          </table:table-cell>
          <table:table-cell table:style-name="ce268" table:formula="of:=[.D5]*[.E5]" office:value-type="float" office:value="0" calcext:value-type="float">
            <text:p><text:s/>- <text:s text:c="2"/></text:p>
          </table:table-cell>
          <table:table-cell table:style-name="ce241"/>
          <table:table-cell table:style-name="ce241" office:value-type="string" calcext:value-type="string">
            <text:p>julian</text:p>
          </table:table-cell>
          <table:table-cell table:style-name="ce241" office:value-type="float" office:value="998932965" calcext:value-type="float">
            <text:p>998932965</text:p>
          </table:table-cell>
          <table:table-cell table:style-name="ce241" table:number-columns-repeated="16375"/>
        </table:table-row>
        <table:table-row table:style-name="ro13">
          <table:table-cell table:style-name="ce241"/>
          <table:table-cell table:style-name="ce244" office:value-type="string" calcext:value-type="string">
            <text:p>II. MEJORAMIENTO DE INFRAESTRUCTURA <text:s/>GALPONES</text:p>
          </table:table-cell>
          <table:table-cell table:style-name="ce255"/>
          <table:table-cell table:style-name="ce263" table:number-columns-repeated="2"/>
          <table:table-cell table:style-name="ce268" table:formula="of:=SUM([.F7:.F25])" office:value-type="float" office:value="38486" calcext:value-type="float">
            <text:p><text:s/>38,486.00 </text:p>
          </table:table-cell>
          <table:table-cell table:style-name="ce241" table:number-columns-repeated="4"/>
          <table:table-cell table:style-name="ce279"/>
          <table:table-cell table:style-name="ce281" office:value-type="string" calcext:value-type="string">
            <text:p>01 GALPON</text:p>
          </table:table-cell>
          <table:table-cell table:style-name="ce282" office:value-type="string" calcext:value-type="string">
            <text:p>6 GALPONES</text:p>
          </table:table-cell>
          <table:table-cell table:style-name="ce241" table:number-columns-repeated="16371"/>
        </table:table-row>
        <table:table-row table:style-name="ro1">
          <table:table-cell table:style-name="ce242"/>
          <table:table-cell table:style-name="ce245" office:value-type="string" calcext:value-type="string">
            <text:p>Clavos para madera c/c 3"</text:p>
          </table:table-cell>
          <table:table-cell table:style-name="ce254" office:value-type="string" calcext:value-type="string">
            <text:p>kg</text:p>
          </table:table-cell>
          <table:table-cell table:style-name="ce262" office:value-type="float" office:value="16" calcext:value-type="float">
            <text:p>16.00</text:p>
          </table:table-cell>
          <table:table-cell table:style-name="ce262" office:value-type="float" office:value="5" calcext:value-type="float">
            <text:p>5.00</text:p>
          </table:table-cell>
          <table:table-cell table:style-name="ce269" table:formula="of:=+[.E7]*[.D7]" office:value-type="float" office:value="80" calcext:value-type="float">
            <text:p><text:s/>80.00 </text:p>
          </table:table-cell>
          <table:table-cell table:style-name="ce242" table:number-columns-repeated="3"/>
          <table:table-cell table:style-name="ce242" office:value-type="string" calcext:value-type="string">
            <text:p>Adobe 0.40x0.25x0.18m</text:p>
          </table:table-cell>
          <table:table-cell table:style-name="ce242"/>
          <table:table-cell table:style-name="ce242" office:value-type="float" office:value="6500" calcext:value-type="float">
            <text:p>6500</text:p>
          </table:table-cell>
          <table:table-cell table:style-name="ce242" table:formula="of:=+[.L7]*6" office:value-type="float" office:value="39000" calcext:value-type="float">
            <text:p>39000</text:p>
          </table:table-cell>
          <table:table-cell table:style-name="ce284" office:value-type="percentage" office:value="0.5" calcext:value-type="percentage">
            <text:p>50 %</text:p>
          </table:table-cell>
          <table:table-cell table:style-name="ce242" table:formula="of:=+[.M7]/2" office:value-type="float" office:value="19500" calcext:value-type="float">
            <text:p>19500</text:p>
          </table:table-cell>
          <table:table-cell table:style-name="ce242" table:number-columns-repeated="16369"/>
        </table:table-row>
        <table:table-row table:style-name="ro1">
          <table:table-cell table:style-name="ce242"/>
          <table:table-cell table:style-name="ce245" office:value-type="string" calcext:value-type="string">
            <text:p>Clavos para madera c/c 4"</text:p>
          </table:table-cell>
          <table:table-cell table:style-name="ce254" office:value-type="string" calcext:value-type="string">
            <text:p>kg</text:p>
          </table:table-cell>
          <table:table-cell table:style-name="ce262" office:value-type="float" office:value="16" calcext:value-type="float">
            <text:p>16.00</text:p>
          </table:table-cell>
          <table:table-cell table:style-name="ce262" office:value-type="float" office:value="5" calcext:value-type="float">
            <text:p>5.00</text:p>
          </table:table-cell>
          <table:table-cell table:style-name="ce269" table:formula="of:=+[.E8]*[.D8]" office:value-type="float" office:value="80" calcext:value-type="float">
            <text:p><text:s/>80.00 </text:p>
          </table:table-cell>
          <table:table-cell table:style-name="ce242" table:number-columns-repeated="3"/>
          <table:table-cell table:style-name="ce242" office:value-type="string" calcext:value-type="string">
            <text:p>Vigas 3"x3"x10'</text:p>
          </table:table-cell>
          <table:table-cell table:style-name="ce242"/>
          <table:table-cell table:style-name="ce242" office:value-type="float" office:value="83" calcext:value-type="float">
            <text:p>83</text:p>
          </table:table-cell>
          <table:table-cell table:style-name="ce242" table:formula="of:=+[.L8]*6" office:value-type="float" office:value="498" calcext:value-type="float">
            <text:p>498</text:p>
          </table:table-cell>
          <table:table-cell table:style-name="ce242" table:number-columns-repeated="16371"/>
        </table:table-row>
        <table:table-row table:style-name="ro1">
          <table:table-cell table:style-name="ce242"/>
          <table:table-cell table:style-name="ce245" office:value-type="string" calcext:value-type="string">
            <text:p>Clavos para calamina</text:p>
          </table:table-cell>
          <table:table-cell table:style-name="ce254" office:value-type="string" calcext:value-type="string">
            <text:p>kg</text:p>
          </table:table-cell>
          <table:table-cell table:style-name="ce262" office:value-type="float" office:value="24" calcext:value-type="float">
            <text:p>24.00</text:p>
          </table:table-cell>
          <table:table-cell table:style-name="ce262" office:value-type="float" office:value="9" calcext:value-type="float">
            <text:p>9.00</text:p>
          </table:table-cell>
          <table:table-cell table:style-name="ce269" table:formula="of:=+[.E9]*[.D9]" office:value-type="float" office:value="216" calcext:value-type="float">
            <text:p><text:s/>216.00 </text:p>
          </table:table-cell>
          <table:table-cell table:style-name="ce242" table:number-columns-repeated="3"/>
          <table:table-cell table:style-name="ce242" office:value-type="string" calcext:value-type="string">
            <text:p>Listones <text:s/>2"x3"x10'</text:p>
          </table:table-cell>
          <table:table-cell table:style-name="ce242"/>
          <table:table-cell table:style-name="ce242" office:value-type="float" office:value="256" calcext:value-type="float">
            <text:p>256</text:p>
          </table:table-cell>
          <table:table-cell table:style-name="ce242" table:formula="of:=+[.L9]*6" office:value-type="float" office:value="1536" calcext:value-type="float">
            <text:p>1536</text:p>
          </table:table-cell>
          <table:table-cell table:style-name="ce242" table:number-columns-repeated="16371"/>
        </table:table-row>
        <table:table-row table:style-name="ro1">
          <table:table-cell/>
          <table:table-cell table:style-name="ce245" office:value-type="string" calcext:value-type="string">
            <text:p>Adobe 0.40x0.25x0.18m</text:p>
          </table:table-cell>
          <table:table-cell table:style-name="ce254" office:value-type="string" calcext:value-type="string">
            <text:p>und</text:p>
          </table:table-cell>
          <table:table-cell table:style-name="ce262" office:value-type="float" office:value="12000" calcext:value-type="float">
            <text:p>12000.00</text:p>
          </table:table-cell>
          <table:table-cell table:style-name="ce262" office:value-type="float" office:value="1" calcext:value-type="float">
            <text:p>1.00</text:p>
          </table:table-cell>
          <table:table-cell table:style-name="ce269" table:formula="of:=+[.E10]*[.D10]" office:value-type="float" office:value="12000" calcext:value-type="float">
            <text:p><text:s/>12,000.00 </text:p>
          </table:table-cell>
          <table:table-cell table:style-name="ce7"/>
          <table:table-cell table:number-columns-repeated="2"/>
          <table:table-cell table:style-name="ce242" office:value-type="string" calcext:value-type="string">
            <text:p>Madera eucalipto rollizo 6"x5m</text:p>
          </table:table-cell>
          <table:table-cell table:style-name="ce242"/>
          <table:table-cell table:style-name="ce242" office:value-type="float" office:value="3" calcext:value-type="float">
            <text:p>3</text:p>
          </table:table-cell>
          <table:table-cell table:style-name="ce242" table:formula="of:=+[.L10]*6" office:value-type="float" office:value="18" calcext:value-type="float">
            <text:p>18</text:p>
          </table:table-cell>
          <table:table-cell table:number-columns-repeated="16371"/>
        </table:table-row>
        <table:table-row table:style-name="ro1">
          <table:table-cell/>
          <table:table-cell table:style-name="ce246" office:value-type="string" calcext:value-type="string">
            <text:p>Vigas Dintel 4"x4"x2.0 m</text:p>
          </table:table-cell>
          <table:table-cell table:style-name="ce254" office:value-type="string" calcext:value-type="string">
            <text:p>und</text:p>
          </table:table-cell>
          <table:table-cell table:style-name="ce262" office:value-type="float" office:value="80" calcext:value-type="float">
            <text:p>80.00</text:p>
          </table:table-cell>
          <table:table-cell table:style-name="ce262" office:value-type="float" office:value="18" calcext:value-type="float">
            <text:p>18.00</text:p>
          </table:table-cell>
          <table:table-cell table:style-name="ce269" table:formula="of:=+[.E11]*[.D11]" office:value-type="float" office:value="1440" calcext:value-type="float">
            <text:p><text:s/>1,440.00 </text:p>
          </table:table-cell>
          <table:table-cell table:style-name="ce7"/>
          <table:table-cell/>
          <table:table-cell table:style-name="ce7" office:value-type="string" calcext:value-type="string">
            <text:p>piedra</text:p>
          </table:table-cell>
          <table:table-cell table:style-name="ce242" table:number-columns-repeated="4"/>
          <table:table-cell table:number-columns-repeated="16371"/>
        </table:table-row>
        <table:table-row table:style-name="ro1">
          <table:table-cell/>
          <table:table-cell table:style-name="ce246" office:value-type="string" calcext:value-type="string">
            <text:p>Vigas 3"x3"x3.5 m</text:p>
          </table:table-cell>
          <table:table-cell table:style-name="ce256" office:value-type="string" calcext:value-type="string">
            <text:p>und</text:p>
          </table:table-cell>
          <table:table-cell table:style-name="ce264" office:value-type="float" office:value="160" calcext:value-type="float">
            <text:p>160.00</text:p>
          </table:table-cell>
          <table:table-cell table:style-name="ce262" office:value-type="float" office:value="15" calcext:value-type="float">
            <text:p>15.00</text:p>
          </table:table-cell>
          <table:table-cell table:style-name="ce269" table:formula="of:=+[.E12]*[.D12]" office:value-type="float" office:value="2400" calcext:value-type="float">
            <text:p><text:s/>2,400.00 </text:p>
          </table:table-cell>
          <table:table-cell table:style-name="ce7"/>
          <table:table-cell table:style-name="ce7" table:formula="of:=8*2*40" office:value-type="float" office:value="640" calcext:value-type="float">
            <text:p>640</text:p>
          </table:table-cell>
          <table:table-cell table:number-columns-repeated="16376"/>
        </table:table-row>
        <table:table-row table:style-name="ro1">
          <table:table-cell/>
          <table:table-cell table:style-name="ce246" office:value-type="string" calcext:value-type="string">
            <text:p>Listones <text:s/>2"x3"x 3.5 m</text:p>
          </table:table-cell>
          <table:table-cell table:style-name="ce256" office:value-type="string" calcext:value-type="string">
            <text:p>und</text:p>
          </table:table-cell>
          <table:table-cell table:style-name="ce264" office:value-type="float" office:value="240" calcext:value-type="float">
            <text:p>240.00</text:p>
          </table:table-cell>
          <table:table-cell table:style-name="ce262" office:value-type="float" office:value="10" calcext:value-type="float">
            <text:p>10.00</text:p>
          </table:table-cell>
          <table:table-cell table:style-name="ce269" table:formula="of:=+[.E13]*[.D13]" office:value-type="float" office:value="2400" calcext:value-type="float">
            <text:p><text:s/>2,400.00 </text:p>
          </table:table-cell>
          <table:table-cell table:style-name="ce7"/>
          <table:table-cell table:formula="of:=6*40*1" office:value-type="float" office:value="240" calcext:value-type="float">
            <text:p>240</text:p>
          </table:table-cell>
          <table:table-cell table:style-name="ce7" office:value-type="string" calcext:value-type="string">
            <text:p>peon</text:p>
          </table:table-cell>
          <table:table-cell/>
          <table:table-cell office:value-type="string" calcext:value-type="string">
            <text:p>puquio</text:p>
          </table:table-cell>
          <table:table-cell table:style-name="ce7" office:value-type="string" calcext:value-type="string">
            <text:p>Galpon 6x9</text:p>
          </table:table-cell>
          <table:table-cell/>
          <table:table-cell table:style-name="ce7" office:value-type="string" calcext:value-type="string">
            <text:p>8 galpones</text:p>
          </table:table-cell>
          <table:table-cell table:number-columns-repeated="16370"/>
        </table:table-row>
        <table:table-row table:style-name="ro1">
          <table:table-cell/>
          <table:table-cell table:style-name="ce246" office:value-type="string" calcext:value-type="string">
            <text:p>Madera eucalipto rollizo 6"x9m</text:p>
          </table:table-cell>
          <table:table-cell table:style-name="ce256" office:value-type="string" calcext:value-type="string">
            <text:p>und</text:p>
          </table:table-cell>
          <table:table-cell table:style-name="ce264" office:value-type="float" office:value="24" calcext:value-type="float">
            <text:p>24.00</text:p>
          </table:table-cell>
          <table:table-cell table:style-name="ce262" office:value-type="float" office:value="70" calcext:value-type="float">
            <text:p>70.00</text:p>
          </table:table-cell>
          <table:table-cell table:style-name="ce269" table:formula="of:=+[.E14]*[.D14]" office:value-type="float" office:value="1680" calcext:value-type="float">
            <text:p><text:s/>1,680.00 </text:p>
          </table:table-cell>
          <table:table-cell table:style-name="ce7"/>
          <table:table-cell table:formula="of:=4*60" office:value-type="float" office:value="240" calcext:value-type="float">
            <text:p>240</text:p>
          </table:table-cell>
          <table:table-cell table:style-name="ce7" office:value-type="string" calcext:value-type="string">
            <text:p>per</text:p>
          </table:table-cell>
          <table:table-cell table:style-name="ce276" office:value-type="string" calcext:value-type="string">
            <text:p>Adobe 0.40x0.25x0.18m</text:p>
          </table:table-cell>
          <table:table-cell table:style-name="ce276"/>
          <table:table-cell table:style-name="ce276" office:value-type="float" office:value="1500" calcext:value-type="float">
            <text:p>1500</text:p>
          </table:table-cell>
          <table:table-cell/>
          <table:table-cell table:style-name="ce285" table:formula="of:=+[.L14]*8" office:value-type="float" office:value="12000" calcext:value-type="float">
            <text:p>12000</text:p>
          </table:table-cell>
          <table:table-cell table:number-columns-repeated="16370"/>
        </table:table-row>
        <table:table-row table:style-name="ro13">
          <table:table-cell/>
          <table:table-cell table:style-name="ce245" office:value-type="string" calcext:value-type="string">
            <text:p>Malla revestido venilo color verde <text:s/>3/4x3/4" calib 1 mm x30 m</text:p>
          </table:table-cell>
          <table:table-cell table:style-name="ce254" office:value-type="string" calcext:value-type="string">
            <text:p>roll</text:p>
          </table:table-cell>
          <table:table-cell table:style-name="ce262" office:value-type="float" office:value="16" calcext:value-type="float">
            <text:p>16.00</text:p>
          </table:table-cell>
          <table:table-cell table:style-name="ce262" office:value-type="float" office:value="185" calcext:value-type="float">
            <text:p>185.00</text:p>
          </table:table-cell>
          <table:table-cell table:style-name="ce269" table:formula="of:=+[.E15]*[.D15]" office:value-type="float" office:value="2960" calcext:value-type="float">
            <text:p><text:s/>2,960.00 </text:p>
          </table:table-cell>
          <table:table-cell table:style-name="ce7"/>
          <table:table-cell table:formula="of:=+[.H14]+[.H13]" office:value-type="float" office:value="480" calcext:value-type="float">
            <text:p>480</text:p>
          </table:table-cell>
          <table:table-cell/>
          <table:table-cell table:style-name="ce276" office:value-type="string" calcext:value-type="string">
            <text:p>Vigas 3"x3"x3.5 m</text:p>
          </table:table-cell>
          <table:table-cell table:style-name="ce276"/>
          <table:table-cell table:style-name="ce276" office:value-type="float" office:value="20" calcext:value-type="float">
            <text:p>20</text:p>
          </table:table-cell>
          <table:table-cell/>
          <table:table-cell table:style-name="ce285" table:formula="of:=+[.L15]*8" office:value-type="float" office:value="160" calcext:value-type="float">
            <text:p>160</text:p>
          </table:table-cell>
          <table:table-cell table:number-columns-repeated="16370"/>
        </table:table-row>
        <table:table-row table:style-name="ro1">
          <table:table-cell/>
          <table:table-cell table:style-name="ce245" office:value-type="string" calcext:value-type="string">
            <text:p>Ventana V1 <text:s/>(1.00x0.50)</text:p>
          </table:table-cell>
          <table:table-cell table:style-name="ce254" office:value-type="string" calcext:value-type="string">
            <text:p>und</text:p>
          </table:table-cell>
          <table:table-cell table:style-name="ce262" office:value-type="float" office:value="32" calcext:value-type="float">
            <text:p>32.00</text:p>
          </table:table-cell>
          <table:table-cell table:style-name="ce262" office:value-type="float" office:value="20" calcext:value-type="float">
            <text:p>20.00</text:p>
          </table:table-cell>
          <table:table-cell table:style-name="ce269" table:formula="of:=+[.E16]*[.D16]" office:value-type="float" office:value="640" calcext:value-type="float">
            <text:p><text:s/>640.00 </text:p>
          </table:table-cell>
          <table:table-cell table:style-name="ce7"/>
          <table:table-cell office:value-type="float" office:value="650" calcext:value-type="float">
            <text:p>650</text:p>
          </table:table-cell>
          <table:table-cell/>
          <table:table-cell table:style-name="ce276" office:value-type="string" calcext:value-type="string">
            <text:p>Listones <text:s/>2"x3"x3.5 m</text:p>
          </table:table-cell>
          <table:table-cell table:style-name="ce276"/>
          <table:table-cell table:style-name="ce276" office:value-type="float" office:value="30" calcext:value-type="float">
            <text:p>30</text:p>
          </table:table-cell>
          <table:table-cell/>
          <table:table-cell table:style-name="ce285" table:formula="of:=+[.L16]*8" office:value-type="float" office:value="240" calcext:value-type="float">
            <text:p>240</text:p>
          </table:table-cell>
          <table:table-cell table:number-columns-repeated="16370"/>
        </table:table-row>
        <table:table-row table:style-name="ro1">
          <table:table-cell/>
          <table:table-cell table:style-name="ce245" office:value-type="string" calcext:value-type="string">
            <text:p>Alambre negro <text:s/>N° 16</text:p>
          </table:table-cell>
          <table:table-cell table:style-name="ce254" office:value-type="string" calcext:value-type="string">
            <text:p>und</text:p>
          </table:table-cell>
          <table:table-cell table:style-name="ce262" office:value-type="float" office:value="40" calcext:value-type="float">
            <text:p>40.00</text:p>
          </table:table-cell>
          <table:table-cell table:style-name="ce262" office:value-type="float" office:value="5" calcext:value-type="float">
            <text:p>5.00</text:p>
          </table:table-cell>
          <table:table-cell table:style-name="ce269" table:formula="of:=+[.E17]*[.D17]" office:value-type="float" office:value="200" calcext:value-type="float">
            <text:p><text:s/>200.00 </text:p>
          </table:table-cell>
          <table:table-cell table:style-name="ce7"/>
          <table:table-cell office:value-type="float" office:value="8" calcext:value-type="float">
            <text:p>8</text:p>
          </table:table-cell>
          <table:table-cell/>
          <table:table-cell table:style-name="ce276" office:value-type="string" calcext:value-type="string">
            <text:p>Madera eucalipto rollizo 6"x3m</text:p>
          </table:table-cell>
          <table:table-cell table:style-name="ce276"/>
          <table:table-cell table:style-name="ce276" office:value-type="float" office:value="1" calcext:value-type="float">
            <text:p>1</text:p>
          </table:table-cell>
          <table:table-cell/>
          <table:table-cell table:style-name="ce285" table:formula="of:=+[.L17]*8" office:value-type="float" office:value="8" calcext:value-type="float">
            <text:p>8</text:p>
          </table:table-cell>
          <table:table-cell table:number-columns-repeated="16370"/>
        </table:table-row>
        <table:table-row table:style-name="ro1">
          <table:table-cell/>
          <table:table-cell table:style-name="ce245" office:value-type="string" calcext:value-type="string">
            <text:p>Puerta madera y calamina P1 (1.20x2.00)</text:p>
          </table:table-cell>
          <table:table-cell table:style-name="ce254" office:value-type="string" calcext:value-type="string">
            <text:p>und</text:p>
          </table:table-cell>
          <table:table-cell table:style-name="ce262" office:value-type="float" office:value="8" calcext:value-type="float">
            <text:p>8.00</text:p>
          </table:table-cell>
          <table:table-cell table:style-name="ce262" office:value-type="float" office:value="80" calcext:value-type="float">
            <text:p>80.00</text:p>
          </table:table-cell>
          <table:table-cell table:style-name="ce269" table:formula="of:=+[.E18]*[.D18]" office:value-type="float" office:value="640" calcext:value-type="float">
            <text:p><text:s/>640.00 </text:p>
          </table:table-cell>
          <table:table-cell table:style-name="ce7"/>
          <table:table-cell table:formula="of:=+[.H17]*[.H16]" office:value-type="float" office:value="5200" calcext:value-type="float">
            <text:p>5200</text:p>
          </table:table-cell>
          <table:table-cell/>
          <table:table-cell table:style-name="ce276" office:value-type="string" calcext:value-type="string">
            <text:p>Madera eucalipto rollizo 6"x9m</text:p>
          </table:table-cell>
          <table:table-cell table:style-name="ce251"/>
          <table:table-cell table:style-name="ce276" office:value-type="float" office:value="3" calcext:value-type="float">
            <text:p>3</text:p>
          </table:table-cell>
          <table:table-cell/>
          <table:table-cell table:style-name="ce285" table:formula="of:=+[.L18]*8" office:value-type="float" office:value="24" calcext:value-type="float">
            <text:p>24</text:p>
          </table:table-cell>
          <table:table-cell table:number-columns-repeated="16370"/>
        </table:table-row>
        <table:table-row table:style-name="ro1">
          <table:table-cell table:style-name="ce242"/>
          <table:table-cell table:style-name="ce245" office:value-type="string" calcext:value-type="string">
            <text:p>Calamina de 0.22 mm de 3.60X 0.8 m</text:p>
          </table:table-cell>
          <table:table-cell table:style-name="ce254" office:value-type="string" calcext:value-type="string">
            <text:p>pln</text:p>
          </table:table-cell>
          <table:table-cell table:style-name="ce262" office:value-type="float" office:value="208" calcext:value-type="float">
            <text:p>208.00</text:p>
          </table:table-cell>
          <table:table-cell table:style-name="ce262" office:value-type="float" office:value="23" calcext:value-type="float">
            <text:p>23.00</text:p>
          </table:table-cell>
          <table:table-cell table:style-name="ce269" table:formula="of:=+[.E19]*[.D19]" office:value-type="float" office:value="4784" calcext:value-type="float">
            <text:p><text:s/>4,784.00 </text:p>
          </table:table-cell>
          <table:table-cell table:style-name="ce242" table:number-columns-repeated="3"/>
          <table:table-cell table:style-name="ce276" office:value-type="string" calcext:value-type="string">
            <text:p>Viga Dintel 4"x4" x 2.5 m</text:p>
          </table:table-cell>
          <table:table-cell table:style-name="ce276"/>
          <table:table-cell table:style-name="ce276" office:value-type="float" office:value="10" calcext:value-type="float">
            <text:p>10</text:p>
          </table:table-cell>
          <table:table-cell table:style-name="ce242"/>
          <table:table-cell table:style-name="ce285" table:formula="of:=+[.L19]*8" office:value-type="float" office:value="80" calcext:value-type="float">
            <text:p>80</text:p>
          </table:table-cell>
          <table:table-cell table:style-name="ce242" table:number-columns-repeated="16370"/>
        </table:table-row>
        <table:table-row table:style-name="ro1">
          <table:table-cell table:style-name="ce242"/>
          <table:table-cell table:style-name="ce245" office:value-type="string" calcext:value-type="string">
            <text:p>Calamina transparente 3.60*0.8 m (Fibra forte)</text:p>
          </table:table-cell>
          <table:table-cell table:style-name="ce254" office:value-type="string" calcext:value-type="string">
            <text:p>pln</text:p>
          </table:table-cell>
          <table:table-cell table:style-name="ce262" office:value-type="float" office:value="16" calcext:value-type="float">
            <text:p>16.00</text:p>
          </table:table-cell>
          <table:table-cell table:style-name="ce262" office:value-type="float" office:value="55" calcext:value-type="float">
            <text:p>55.00</text:p>
          </table:table-cell>
          <table:table-cell table:style-name="ce269" table:formula="of:=+[.E20]*[.D20]" office:value-type="float" office:value="880" calcext:value-type="float">
            <text:p><text:s/>880.00 </text:p>
          </table:table-cell>
          <table:table-cell table:style-name="ce242"/>
          <table:table-cell table:style-name="ce242" table:formula="of:=+[.H18]/60" office:value-type="float" office:value="86.6666666666667" calcext:value-type="float">
            <text:p>86.6666666666667</text:p>
          </table:table-cell>
          <table:table-cell table:style-name="ce242"/>
          <table:table-cell table:style-name="ce277" office:value-type="string" calcext:value-type="string" table:number-columns-spanned="2" table:number-rows-spanned="1">
            <text:p>calamina</text:p>
          </table:table-cell>
          <table:covered-table-cell table:style-name="ce280"/>
          <table:table-cell table:style-name="ce276" office:value-type="float" office:value="26" calcext:value-type="float">
            <text:p>26</text:p>
          </table:table-cell>
          <table:table-cell table:style-name="ce242"/>
          <table:table-cell table:style-name="ce285" table:formula="of:=+[.L20]*8" office:value-type="float" office:value="208" calcext:value-type="float">
            <text:p>208</text:p>
          </table:table-cell>
          <table:table-cell table:style-name="ce242" table:number-columns-repeated="16370"/>
        </table:table-row>
        <table:table-row table:style-name="ro1">
          <table:table-cell table:style-name="ce242"/>
          <table:table-cell table:style-name="ce245" office:value-type="string" calcext:value-type="string">
            <text:p>Tubo PVC diam 1/2" C-10</text:p>
          </table:table-cell>
          <table:table-cell table:style-name="ce254" office:value-type="string" calcext:value-type="string">
            <text:p>und</text:p>
          </table:table-cell>
          <table:table-cell table:style-name="ce262" table:formula="of:=8*5" office:value-type="float" office:value="40" calcext:value-type="float">
            <text:p>40.00</text:p>
          </table:table-cell>
          <table:table-cell table:style-name="ce264" office:value-type="float" office:value="12" calcext:value-type="float">
            <text:p>12.00</text:p>
          </table:table-cell>
          <table:table-cell table:style-name="ce269" table:formula="of:=+[.E21]*[.D21]" office:value-type="float" office:value="480" calcext:value-type="float">
            <text:p><text:s/>480.00 </text:p>
          </table:table-cell>
          <table:table-cell table:style-name="ce242" table:number-columns-repeated="3"/>
          <table:table-cell table:style-name="ce276" office:value-type="string" calcext:value-type="string">
            <text:p>calamina trnas</text:p>
          </table:table-cell>
          <table:table-cell table:style-name="ce276"/>
          <table:table-cell table:style-name="ce276" office:value-type="float" office:value="2" calcext:value-type="float">
            <text:p>2</text:p>
          </table:table-cell>
          <table:table-cell table:style-name="ce242"/>
          <table:table-cell table:style-name="ce285" table:formula="of:=+[.L21]*8" office:value-type="float" office:value="16" calcext:value-type="float">
            <text:p>16</text:p>
          </table:table-cell>
          <table:table-cell table:style-name="ce242" table:number-columns-repeated="16370"/>
        </table:table-row>
        <table:table-row table:style-name="ro1">
          <table:table-cell table:style-name="ce242"/>
          <table:table-cell table:style-name="ce245" office:value-type="string" calcext:value-type="string">
            <text:p>Cinta teflon</text:p>
          </table:table-cell>
          <table:table-cell table:style-name="ce254" office:value-type="string" calcext:value-type="string">
            <text:p>und</text:p>
          </table:table-cell>
          <table:table-cell table:style-name="ce262" table:formula="of:=8*2" office:value-type="float" office:value="16" calcext:value-type="float">
            <text:p>16.00</text:p>
          </table:table-cell>
          <table:table-cell table:style-name="ce264" office:value-type="float" office:value="1" calcext:value-type="float">
            <text:p>1.00</text:p>
          </table:table-cell>
          <table:table-cell table:style-name="ce269" table:formula="of:=+[.E22]*[.D22]" office:value-type="float" office:value="16" calcext:value-type="float">
            <text:p><text:s/>16.00 </text:p>
          </table:table-cell>
          <table:table-cell table:style-name="ce242" table:number-columns-repeated="3"/>
          <table:table-cell table:style-name="ce276" office:value-type="string" calcext:value-type="string">
            <text:p>clavo de calanina</text:p>
          </table:table-cell>
          <table:table-cell table:style-name="ce276"/>
          <table:table-cell table:style-name="ce276" office:value-type="float" office:value="3" calcext:value-type="float">
            <text:p>3</text:p>
          </table:table-cell>
          <table:table-cell table:style-name="ce242"/>
          <table:table-cell table:style-name="ce285" table:formula="of:=+[.L22]*8" office:value-type="float" office:value="24" calcext:value-type="float">
            <text:p>24</text:p>
          </table:table-cell>
          <table:table-cell table:style-name="ce242" table:number-columns-repeated="16370"/>
        </table:table-row>
        <table:table-row table:style-name="ro1">
          <table:table-cell table:style-name="ce242"/>
          <table:table-cell table:style-name="ce245" office:value-type="string" calcext:value-type="string">
            <text:p>Pagamento PVC 237 ml</text:p>
          </table:table-cell>
          <table:table-cell table:style-name="ce254" office:value-type="string" calcext:value-type="string">
            <text:p>und</text:p>
          </table:table-cell>
          <table:table-cell table:style-name="ce262" office:value-type="float" office:value="8" calcext:value-type="float">
            <text:p>8.00</text:p>
          </table:table-cell>
          <table:table-cell table:style-name="ce264" office:value-type="float" office:value="12" calcext:value-type="float">
            <text:p>12.00</text:p>
          </table:table-cell>
          <table:table-cell table:style-name="ce269" table:formula="of:=+[.E23]*[.D23]" office:value-type="float" office:value="96" calcext:value-type="float">
            <text:p><text:s/>96.00 </text:p>
          </table:table-cell>
          <table:table-cell table:style-name="ce242" table:number-columns-repeated="3"/>
          <table:table-cell table:style-name="ce277" office:value-type="string" calcext:value-type="string" table:number-columns-spanned="2" table:number-rows-spanned="1">
            <text:p>clavo4</text:p>
          </table:table-cell>
          <table:covered-table-cell table:style-name="ce280"/>
          <table:table-cell table:style-name="ce276" office:value-type="float" office:value="2" calcext:value-type="float">
            <text:p>2</text:p>
          </table:table-cell>
          <table:table-cell/>
          <table:table-cell table:style-name="ce285" table:formula="of:=+[.L23]*8" office:value-type="float" office:value="16" calcext:value-type="float">
            <text:p>16</text:p>
          </table:table-cell>
          <table:table-cell table:style-name="ce242" table:number-columns-repeated="16370"/>
        </table:table-row>
        <table:table-row table:style-name="ro1">
          <table:table-cell/>
          <table:table-cell table:style-name="ce247" office:value-type="string" calcext:value-type="string">
            <text:p>Bebedero Automatico </text:p>
          </table:table-cell>
          <table:table-cell table:style-name="ce257" office:value-type="string" calcext:value-type="string">
            <text:p>und</text:p>
          </table:table-cell>
          <table:table-cell table:style-name="ce264" table:formula="of:=8*22*2" office:value-type="float" office:value="352" calcext:value-type="float">
            <text:p>352.00</text:p>
          </table:table-cell>
          <table:table-cell table:style-name="ce266" office:value-type="float" office:value="6" calcext:value-type="float">
            <text:p>6.00</text:p>
          </table:table-cell>
          <table:table-cell table:style-name="ce269" table:formula="of:=+[.E24]*[.D24]" office:value-type="float" office:value="2112" calcext:value-type="float">
            <text:p><text:s/>2,112.00 </text:p>
          </table:table-cell>
          <table:table-cell table:style-name="ce7"/>
          <table:table-cell table:number-columns-repeated="2"/>
          <table:table-cell table:style-name="ce277" office:value-type="string" calcext:value-type="string" table:number-columns-spanned="2" table:number-rows-spanned="1">
            <text:p>clavo 3</text:p>
          </table:table-cell>
          <table:covered-table-cell table:style-name="ce280"/>
          <table:table-cell table:style-name="ce276" office:value-type="float" office:value="2" calcext:value-type="float">
            <text:p>2</text:p>
          </table:table-cell>
          <table:table-cell/>
          <table:table-cell table:style-name="ce285" table:formula="of:=+[.L24]*8" office:value-type="float" office:value="16" calcext:value-type="float">
            <text:p>16</text:p>
          </table:table-cell>
          <table:table-cell table:number-columns-repeated="16370"/>
        </table:table-row>
        <table:table-row table:style-name="ro1">
          <table:table-cell/>
          <table:table-cell table:style-name="ce245" office:value-type="string" calcext:value-type="string">
            <text:p>Cuyes existentes del galpon</text:p>
          </table:table-cell>
          <table:table-cell table:style-name="ce254" office:value-type="string" calcext:value-type="string">
            <text:p>und</text:p>
          </table:table-cell>
          <table:table-cell table:style-name="ce262" office:value-type="float" office:value="299" calcext:value-type="float">
            <text:p>299.00</text:p>
          </table:table-cell>
          <table:table-cell table:style-name="ce262" office:value-type="float" office:value="18" calcext:value-type="float">
            <text:p>18.00</text:p>
          </table:table-cell>
          <table:table-cell table:style-name="ce269" table:formula="of:=+[.E25]*[.D25]" office:value-type="float" office:value="5382" calcext:value-type="float">
            <text:p><text:s/>5,382.00 </text:p>
          </table:table-cell>
          <table:table-cell table:style-name="ce273"/>
          <table:table-cell table:number-columns-repeated="2"/>
          <table:table-cell table:style-name="ce276" office:value-type="string" calcext:value-type="string">
            <text:p>alambre n° 16</text:p>
          </table:table-cell>
          <table:table-cell table:style-name="ce276"/>
          <table:table-cell table:style-name="ce276" office:value-type="float" office:value="5" calcext:value-type="float">
            <text:p>5</text:p>
          </table:table-cell>
          <table:table-cell table:style-name="ce241"/>
          <table:table-cell table:style-name="ce285" table:formula="of:=+[.L25]*8" office:value-type="float" office:value="40" calcext:value-type="float">
            <text:p>40</text:p>
          </table:table-cell>
          <table:table-cell table:number-columns-repeated="16370"/>
        </table:table-row>
        <table:table-row table:style-name="ro1">
          <table:table-cell/>
          <table:table-cell table:style-name="ce245" office:value-type="string" calcext:value-type="string">
            <text:p>Operario</text:p>
          </table:table-cell>
          <table:table-cell table:style-name="ce254" office:value-type="string" calcext:value-type="string">
            <text:p>Jor</text:p>
          </table:table-cell>
          <table:table-cell table:style-name="ce262" office:value-type="float" office:value="90" calcext:value-type="float">
            <text:p>90.00</text:p>
          </table:table-cell>
          <table:table-cell table:style-name="ce262" office:value-type="float" office:value="60" calcext:value-type="float">
            <text:p>60.00</text:p>
          </table:table-cell>
          <table:table-cell table:style-name="ce269" table:formula="of:=+[.E26]*[.D26]" office:value-type="float" office:value="5400" calcext:value-type="float">
            <text:p><text:s/>5,400.00 </text:p>
          </table:table-cell>
          <table:table-cell table:style-name="ce273"/>
          <table:table-cell table:number-columns-repeated="2"/>
          <table:table-cell table:style-name="ce276" table:number-columns-repeated="3"/>
          <table:table-cell table:style-name="ce241"/>
          <table:table-cell table:style-name="ce285"/>
          <table:table-cell table:number-columns-repeated="16370"/>
        </table:table-row>
        <table:table-row table:style-name="ro1">
          <table:table-cell table:style-name="ce241"/>
          <table:table-cell table:style-name="ce244" office:value-type="string" calcext:value-type="string">
            <text:p>III. INSTALACION DE PASTOS</text:p>
          </table:table-cell>
          <table:table-cell table:style-name="ce255" table:number-columns-repeated="3"/>
          <table:table-cell table:style-name="ce268" table:formula="of:=SUM([.F28:.F35])" office:value-type="float" office:value="23482" calcext:value-type="float">
            <text:p><text:s/>23,482.00 </text:p>
          </table:table-cell>
          <table:table-cell table:style-name="ce241" table:number-columns-repeated="3"/>
          <table:table-cell table:style-name="ce278" office:value-type="string" calcext:value-type="string">
            <text:p>puerta</text:p>
          </table:table-cell>
          <table:table-cell table:style-name="ce278"/>
          <table:table-cell table:style-name="ce278" office:value-type="float" office:value="1" calcext:value-type="float">
            <text:p>1</text:p>
          </table:table-cell>
          <table:table-cell table:style-name="ce283"/>
          <table:table-cell table:style-name="ce286" table:formula="of:=+[.L27]*8" office:value-type="float" office:value="8" calcext:value-type="float">
            <text:p>8</text:p>
          </table:table-cell>
          <table:table-cell table:style-name="ce241" table:number-columns-repeated="16370"/>
        </table:table-row>
        <table:table-row table:style-name="ro1">
          <table:table-cell table:style-name="ce7"/>
          <table:table-cell table:style-name="ce245" office:value-type="string" calcext:value-type="string">
            <text:p>Manguera <text:s/>HDP DIAM 1" <text:s/>X 100 M c-8</text:p>
          </table:table-cell>
          <table:table-cell table:style-name="ce254" office:value-type="string" calcext:value-type="string">
            <text:p>roll</text:p>
          </table:table-cell>
          <table:table-cell table:style-name="ce264" office:value-type="float" office:value="31" calcext:value-type="float">
            <text:p>31.00</text:p>
          </table:table-cell>
          <table:table-cell table:style-name="ce264" office:value-type="float" office:value="120" calcext:value-type="float">
            <text:p>120.00</text:p>
          </table:table-cell>
          <table:table-cell table:style-name="ce269" table:formula="of:=[.D28]*[.E28]" office:value-type="float" office:value="3720" calcext:value-type="float">
            <text:p><text:s/>3,720.00 </text:p>
          </table:table-cell>
          <table:table-cell table:style-name="ce7"/>
          <table:table-cell table:number-columns-repeated="2"/>
          <table:table-cell table:style-name="ce276" office:value-type="string" calcext:value-type="string">
            <text:p>ventana</text:p>
          </table:table-cell>
          <table:table-cell table:style-name="ce276"/>
          <table:table-cell table:style-name="ce276" office:value-type="float" office:value="4" calcext:value-type="float">
            <text:p>4</text:p>
          </table:table-cell>
          <table:table-cell table:style-name="ce242"/>
          <table:table-cell table:style-name="ce285" table:formula="of:=+[.L28]*8" office:value-type="float" office:value="32" calcext:value-type="float">
            <text:p>32</text:p>
          </table:table-cell>
          <table:table-cell table:number-columns-repeated="16370"/>
        </table:table-row>
        <table:table-row table:style-name="ro1">
          <table:table-cell table:style-name="ce7"/>
          <table:table-cell table:style-name="ce245" office:value-type="string" calcext:value-type="string">
            <text:p>Aspersor circular ibis 1" para Presion 4 bares</text:p>
          </table:table-cell>
          <table:table-cell table:style-name="ce254" office:value-type="string" calcext:value-type="string">
            <text:p>und</text:p>
          </table:table-cell>
          <table:table-cell table:style-name="ce264" office:value-type="float" office:value="31" calcext:value-type="float">
            <text:p>31.00</text:p>
          </table:table-cell>
          <table:table-cell table:style-name="ce264" office:value-type="float" office:value="140" calcext:value-type="float">
            <text:p>140.00</text:p>
          </table:table-cell>
          <table:table-cell table:style-name="ce269" table:formula="of:=[.D29]*[.E29]" office:value-type="float" office:value="4340" calcext:value-type="float">
            <text:p><text:s/>4,340.00 </text:p>
          </table:table-cell>
          <table:table-cell table:style-name="ce7"/>
          <table:table-cell table:number-columns-repeated="2"/>
          <table:table-cell table:style-name="ce241" table:number-columns-repeated="3"/>
          <table:table-cell/>
          <table:table-cell table:style-name="ce285"/>
          <table:table-cell table:number-columns-repeated="16370"/>
        </table:table-row>
        <table:table-row table:style-name="ro1">
          <table:table-cell table:style-name="ce7"/>
          <table:table-cell table:style-name="ce245" office:value-type="string" calcext:value-type="string">
            <text:p>Semilla de alfalfa Moapa</text:p>
          </table:table-cell>
          <table:table-cell table:style-name="ce254" office:value-type="string" calcext:value-type="string">
            <text:p>kg</text:p>
          </table:table-cell>
          <table:table-cell table:style-name="ce264" office:value-type="float" office:value="31" calcext:value-type="float">
            <text:p>31.00</text:p>
          </table:table-cell>
          <table:table-cell table:style-name="ce262" office:value-type="float" office:value="40" calcext:value-type="float">
            <text:p>40.00</text:p>
          </table:table-cell>
          <table:table-cell table:style-name="ce269" table:formula="of:=[.D30]*[.E30]" office:value-type="float" office:value="1240" calcext:value-type="float">
            <text:p><text:s/>1,240.00 </text:p>
          </table:table-cell>
          <table:table-cell table:style-name="ce7"/>
          <table:table-cell table:number-columns-repeated="16377"/>
        </table:table-row>
        <table:table-row table:style-name="ro1">
          <table:table-cell table:style-name="ce7"/>
          <table:table-cell table:style-name="ce245" office:value-type="string" calcext:value-type="string">
            <text:p>Guano de corral (saco 50 kg)</text:p>
          </table:table-cell>
          <table:table-cell table:style-name="ce254" office:value-type="string" calcext:value-type="string">
            <text:p>sac</text:p>
          </table:table-cell>
          <table:table-cell table:style-name="ce262" office:value-type="float" office:value="200" calcext:value-type="float">
            <text:p>200.00</text:p>
          </table:table-cell>
          <table:table-cell table:style-name="ce262" office:value-type="float" office:value="10" calcext:value-type="float">
            <text:p>10.00</text:p>
          </table:table-cell>
          <table:table-cell table:style-name="ce269" table:formula="of:=[.D31]*[.E31]" office:value-type="float" office:value="2000" calcext:value-type="float">
            <text:p><text:s/>2,000.00 </text:p>
          </table:table-cell>
          <table:table-cell table:style-name="ce7"/>
          <table:table-cell table:number-columns-repeated="16377"/>
        </table:table-row>
        <table:table-row table:style-name="ro1">
          <table:table-cell table:style-name="ce7"/>
          <table:table-cell table:style-name="ce245" office:value-type="string" calcext:value-type="string">
            <text:p>Guano de isla</text:p>
          </table:table-cell>
          <table:table-cell table:style-name="ce254" office:value-type="string" calcext:value-type="string">
            <text:p>sac</text:p>
          </table:table-cell>
          <table:table-cell table:style-name="ce262" office:value-type="float" office:value="31" calcext:value-type="float">
            <text:p>31.00</text:p>
          </table:table-cell>
          <table:table-cell table:style-name="ce262" office:value-type="float" office:value="55" calcext:value-type="float">
            <text:p>55.00</text:p>
          </table:table-cell>
          <table:table-cell table:style-name="ce269" table:formula="of:=[.D32]*[.E32]" office:value-type="float" office:value="1705" calcext:value-type="float">
            <text:p><text:s/>1,705.00 </text:p>
          </table:table-cell>
          <table:table-cell table:style-name="ce7"/>
          <table:table-cell table:number-columns-repeated="16377"/>
        </table:table-row>
        <table:table-row table:style-name="ro1">
          <table:table-cell table:style-name="ce7"/>
          <table:table-cell table:style-name="ce245" office:value-type="string" calcext:value-type="string">
            <text:p>Inoculante ( sobre de 100 gr)</text:p>
          </table:table-cell>
          <table:table-cell table:style-name="ce254" office:value-type="string" calcext:value-type="string">
            <text:p>sbr</text:p>
          </table:table-cell>
          <table:table-cell table:style-name="ce262" office:value-type="float" office:value="15" calcext:value-type="float">
            <text:p>15.00</text:p>
          </table:table-cell>
          <table:table-cell table:style-name="ce262" office:value-type="float" office:value="23" calcext:value-type="float">
            <text:p>23.00</text:p>
          </table:table-cell>
          <table:table-cell table:style-name="ce269" table:formula="of:=[.D33]*[.E33]" office:value-type="float" office:value="345" calcext:value-type="float">
            <text:p><text:s/>345.00 </text:p>
          </table:table-cell>
          <table:table-cell table:style-name="ce7"/>
          <table:table-cell table:number-columns-repeated="16377"/>
        </table:table-row>
        <table:table-row table:style-name="ro1">
          <table:table-cell table:style-name="ce7"/>
          <table:table-cell table:style-name="ce245" office:value-type="string" calcext:value-type="string">
            <text:p>Alimento concentrado (saco 40 kg)</text:p>
          </table:table-cell>
          <table:table-cell table:style-name="ce254" office:value-type="string" calcext:value-type="string">
            <text:p>sac</text:p>
          </table:table-cell>
          <table:table-cell table:style-name="ce262" table:formula="of:=31*4" office:value-type="float" office:value="124" calcext:value-type="float">
            <text:p>124.00</text:p>
          </table:table-cell>
          <table:table-cell table:style-name="ce262" office:value-type="float" office:value="78" calcext:value-type="float">
            <text:p>78.00</text:p>
          </table:table-cell>
          <table:table-cell table:style-name="ce269" table:formula="of:=[.D34]*[.E34]" office:value-type="float" office:value="9672" calcext:value-type="float">
            <text:p><text:s/>9,672.00 </text:p>
          </table:table-cell>
          <table:table-cell table:style-name="ce7"/>
          <table:table-cell table:number-columns-repeated="16377"/>
        </table:table-row>
        <table:table-row table:style-name="ro1">
          <table:table-cell table:style-name="ce7"/>
          <table:table-cell table:style-name="ce245" office:value-type="string" calcext:value-type="string">
            <text:p>Semilla de cebada para FVH</text:p>
          </table:table-cell>
          <table:table-cell table:style-name="ce254" office:value-type="string" calcext:value-type="string">
            <text:p>kg</text:p>
          </table:table-cell>
          <table:table-cell table:style-name="ce262" office:value-type="float" office:value="200" calcext:value-type="float">
            <text:p>200.00</text:p>
          </table:table-cell>
          <table:table-cell table:style-name="ce262" office:value-type="float" office:value="2.3" calcext:value-type="float">
            <text:p>2.30</text:p>
          </table:table-cell>
          <table:table-cell table:style-name="ce269" table:formula="of:=[.D35]*[.E35]" office:value-type="float" office:value="460" calcext:value-type="float">
            <text:p><text:s/>460.00 </text:p>
          </table:table-cell>
          <table:table-cell table:style-name="ce7"/>
          <table:table-cell table:number-columns-repeated="16377"/>
        </table:table-row>
        <table:table-row table:style-name="ro1">
          <table:table-cell/>
          <table:table-cell table:style-name="ce244" office:value-type="string" calcext:value-type="string">
            <text:p>TOTAL TERRENOS Y OBRAS CIVILES</text:p>
          </table:table-cell>
          <table:table-cell table:style-name="ce254"/>
          <table:table-cell table:style-name="ce265"/>
          <table:table-cell table:style-name="ce254"/>
          <table:table-cell table:style-name="ce268" table:formula="of:=[.F27]+[.F6]+[.F5]" office:value-type="float" office:value="61968" calcext:value-type="float">
            <text:p><text:s/>61,968.00 </text:p>
          </table:table-cell>
          <table:table-cell table:style-name="ce274" table:formula="of:=[.F6]+[.F27]" office:value-type="float" office:value="61968" calcext:value-type="float">
            <text:p><text:s/>61,968.00 </text:p>
          </table:table-cell>
          <table:table-cell table:style-name="ce275" office:value-type="string" calcext:value-type="string">
            <text:p>sujeto a depreciacion.</text:p>
          </table:table-cell>
          <table:table-cell table:style-name="ce275"/>
          <table:table-cell table:number-columns-repeated="16375"/>
        </table:table-row>
        <table:table-row table:style-name="ro1" table:number-rows-repeated="4">
          <table:table-cell/>
          <table:table-cell table:style-name="ce248"/>
          <table:table-cell table:style-name="ce258" table:number-columns-repeated="4"/>
          <table:table-cell table:style-name="ce248"/>
          <table:table-cell table:number-columns-repeated="16377"/>
        </table:table-row>
        <table:table-row table:style-name="ro1">
          <table:table-cell/>
          <table:table-cell table:style-name="ce249" office:value-type="string" calcext:value-type="string">
            <text:p>A NOMBRE DE <text:s/>GOBIERNO REGIONAL AYACUCHO</text:p>
          </table:table-cell>
          <table:table-cell table:style-name="ce258" table:number-columns-repeated="4"/>
          <table:table-cell table:style-name="ce248"/>
          <table:table-cell table:number-columns-repeated="16377"/>
        </table:table-row>
        <table:table-row table:style-name="ro1">
          <table:table-cell/>
          <table:table-cell table:style-name="ce250" office:value-type="string" calcext:value-type="string">
            <text:p>DESCRIPCION</text:p>
          </table:table-cell>
          <table:table-cell table:style-name="ce259" office:value-type="string" calcext:value-type="string">
            <text:p>UND</text:p>
          </table:table-cell>
          <table:table-cell table:style-name="ce259" office:value-type="string" calcext:value-type="string">
            <text:p>CANT</text:p>
          </table:table-cell>
          <table:table-cell table:style-name="ce259" office:value-type="string" calcext:value-type="string">
            <text:p>P.U</text:p>
          </table:table-cell>
          <table:table-cell table:style-name="ce259" office:value-type="string" calcext:value-type="string">
            <text:p>PARCIAL</text:p>
          </table:table-cell>
          <table:table-cell table:style-name="ce248"/>
          <table:table-cell table:number-columns-repeated="16377"/>
        </table:table-row>
        <table:table-row table:style-name="ro1">
          <table:table-cell/>
          <table:table-cell table:style-name="ce251" office:value-type="string" calcext:value-type="string">
            <text:p>Clavos para madera c/c 3"</text:p>
          </table:table-cell>
          <table:table-cell table:style-name="ce260" office:value-type="string" calcext:value-type="string">
            <text:p>kg</text:p>
          </table:table-cell>
          <table:table-cell table:style-name="ce260" office:value-type="float" office:value="16" calcext:value-type="float">
            <text:p>16</text:p>
          </table:table-cell>
          <table:table-cell table:style-name="ce260" office:value-type="float" office:value="5" calcext:value-type="float">
            <text:p>5</text:p>
          </table:table-cell>
          <table:table-cell table:style-name="ce270" office:value-type="float" office:value="80" calcext:value-type="float">
            <text:p>80.00</text:p>
          </table:table-cell>
          <table:table-cell table:style-name="ce248"/>
          <table:table-cell table:number-columns-repeated="16377"/>
        </table:table-row>
        <table:table-row table:style-name="ro1">
          <table:table-cell/>
          <table:table-cell table:style-name="ce251" office:value-type="string" calcext:value-type="string">
            <text:p>Clavos para madera c/c 4"</text:p>
          </table:table-cell>
          <table:table-cell table:style-name="ce260" office:value-type="string" calcext:value-type="string">
            <text:p>kg</text:p>
          </table:table-cell>
          <table:table-cell table:style-name="ce260" office:value-type="float" office:value="16" calcext:value-type="float">
            <text:p>16</text:p>
          </table:table-cell>
          <table:table-cell table:style-name="ce260" office:value-type="float" office:value="5" calcext:value-type="float">
            <text:p>5</text:p>
          </table:table-cell>
          <table:table-cell table:style-name="ce270" office:value-type="float" office:value="80" calcext:value-type="float">
            <text:p>80.00</text:p>
          </table:table-cell>
          <table:table-cell table:style-name="ce248"/>
          <table:table-cell table:number-columns-repeated="16377"/>
        </table:table-row>
        <table:table-row table:style-name="ro1">
          <table:table-cell/>
          <table:table-cell table:style-name="ce251" office:value-type="string" calcext:value-type="string">
            <text:p>Clavos para calamina</text:p>
          </table:table-cell>
          <table:table-cell table:style-name="ce260" office:value-type="string" calcext:value-type="string">
            <text:p>kg</text:p>
          </table:table-cell>
          <table:table-cell table:style-name="ce260" office:value-type="float" office:value="24" calcext:value-type="float">
            <text:p>24</text:p>
          </table:table-cell>
          <table:table-cell table:style-name="ce260" office:value-type="float" office:value="9" calcext:value-type="float">
            <text:p>9</text:p>
          </table:table-cell>
          <table:table-cell table:style-name="ce270" office:value-type="float" office:value="216" calcext:value-type="float">
            <text:p>216.00</text:p>
          </table:table-cell>
          <table:table-cell table:style-name="ce248"/>
          <table:table-cell table:number-columns-repeated="16377"/>
        </table:table-row>
        <table:table-row table:style-name="ro1">
          <table:table-cell/>
          <table:table-cell table:style-name="ce251" office:value-type="string" calcext:value-type="string">
            <text:p>Malla revestido venilo color verde <text:s/>3/4x3/4" calib 1 mm x30 m</text:p>
          </table:table-cell>
          <table:table-cell table:style-name="ce260" office:value-type="string" calcext:value-type="string">
            <text:p>roll</text:p>
          </table:table-cell>
          <table:table-cell table:style-name="ce260" office:value-type="float" office:value="16" calcext:value-type="float">
            <text:p>16</text:p>
          </table:table-cell>
          <table:table-cell table:style-name="ce260" office:value-type="float" office:value="185" calcext:value-type="float">
            <text:p>185</text:p>
          </table:table-cell>
          <table:table-cell table:style-name="ce270" office:value-type="float" office:value="2960" calcext:value-type="float">
            <text:p>2,960.00</text:p>
          </table:table-cell>
          <table:table-cell table:style-name="ce248"/>
          <table:table-cell table:number-columns-repeated="16377"/>
        </table:table-row>
        <table:table-row table:style-name="ro1">
          <table:table-cell/>
          <table:table-cell table:style-name="ce251" office:value-type="string" calcext:value-type="string">
            <text:p>Alambre negro <text:s/>N° 16</text:p>
          </table:table-cell>
          <table:table-cell table:style-name="ce260" office:value-type="string" calcext:value-type="string">
            <text:p>und</text:p>
          </table:table-cell>
          <table:table-cell table:style-name="ce260" office:value-type="float" office:value="40" calcext:value-type="float">
            <text:p>40</text:p>
          </table:table-cell>
          <table:table-cell table:style-name="ce260" office:value-type="float" office:value="5" calcext:value-type="float">
            <text:p>5</text:p>
          </table:table-cell>
          <table:table-cell table:style-name="ce270" office:value-type="float" office:value="200" calcext:value-type="float">
            <text:p>200.00</text:p>
          </table:table-cell>
          <table:table-cell table:style-name="ce248"/>
          <table:table-cell table:number-columns-repeated="16377"/>
        </table:table-row>
        <table:table-row table:style-name="ro1">
          <table:table-cell/>
          <table:table-cell table:style-name="ce251" office:value-type="string" calcext:value-type="string">
            <text:p>Calamina de 0.22 mm de 3.60X 0.8 m</text:p>
          </table:table-cell>
          <table:table-cell table:style-name="ce260" office:value-type="string" calcext:value-type="string">
            <text:p>pln</text:p>
          </table:table-cell>
          <table:table-cell table:style-name="ce260" office:value-type="float" office:value="208" calcext:value-type="float">
            <text:p>208</text:p>
          </table:table-cell>
          <table:table-cell table:style-name="ce254" office:value-type="float" office:value="23" calcext:value-type="float">
            <text:p>23</text:p>
          </table:table-cell>
          <table:table-cell table:style-name="ce270" table:formula="of:=+[.E48]*[.D48]" office:value-type="float" office:value="4784" calcext:value-type="float">
            <text:p>4,784.00</text:p>
          </table:table-cell>
          <table:table-cell table:style-name="ce248"/>
          <table:table-cell table:number-columns-repeated="16377"/>
        </table:table-row>
        <table:table-row table:style-name="ro1">
          <table:table-cell/>
          <table:table-cell table:style-name="ce251" office:value-type="string" calcext:value-type="string">
            <text:p>Calamina transparente 3.60*0.8 m (Fibra forte)</text:p>
          </table:table-cell>
          <table:table-cell table:style-name="ce260" office:value-type="string" calcext:value-type="string">
            <text:p>pln</text:p>
          </table:table-cell>
          <table:table-cell table:style-name="ce260" office:value-type="float" office:value="16" calcext:value-type="float">
            <text:p>16</text:p>
          </table:table-cell>
          <table:table-cell table:style-name="ce260" office:value-type="float" office:value="55" calcext:value-type="float">
            <text:p>55</text:p>
          </table:table-cell>
          <table:table-cell table:style-name="ce270" table:formula="of:=+[.E49]*[.D49]" office:value-type="float" office:value="880" calcext:value-type="float">
            <text:p>880.00</text:p>
          </table:table-cell>
          <table:table-cell table:style-name="ce248"/>
          <table:table-cell table:number-columns-repeated="16377"/>
        </table:table-row>
        <table:table-row table:style-name="ro1">
          <table:table-cell/>
          <table:table-cell table:style-name="ce251" office:value-type="string" calcext:value-type="string">
            <text:p>Tubo PVC diam 1/2" C-10</text:p>
          </table:table-cell>
          <table:table-cell table:style-name="ce260" office:value-type="string" calcext:value-type="string">
            <text:p>und</text:p>
          </table:table-cell>
          <table:table-cell table:style-name="ce260" office:value-type="float" office:value="40" calcext:value-type="float">
            <text:p>40</text:p>
          </table:table-cell>
          <table:table-cell table:style-name="ce260" office:value-type="float" office:value="12" calcext:value-type="float">
            <text:p>12</text:p>
          </table:table-cell>
          <table:table-cell table:style-name="ce270" table:formula="of:=+[.E50]*[.D50]" office:value-type="float" office:value="480" calcext:value-type="float">
            <text:p>480.00</text:p>
          </table:table-cell>
          <table:table-cell table:style-name="ce248"/>
          <table:table-cell table:number-columns-repeated="16377"/>
        </table:table-row>
        <table:table-row table:style-name="ro1">
          <table:table-cell/>
          <table:table-cell table:style-name="ce251" office:value-type="string" calcext:value-type="string">
            <text:p>Cinta teflon</text:p>
          </table:table-cell>
          <table:table-cell table:style-name="ce260" office:value-type="string" calcext:value-type="string">
            <text:p>und</text:p>
          </table:table-cell>
          <table:table-cell table:style-name="ce260" office:value-type="float" office:value="16" calcext:value-type="float">
            <text:p>16</text:p>
          </table:table-cell>
          <table:table-cell table:style-name="ce260" office:value-type="float" office:value="1" calcext:value-type="float">
            <text:p>1</text:p>
          </table:table-cell>
          <table:table-cell table:style-name="ce270" table:formula="of:=+[.E51]*[.D51]" office:value-type="float" office:value="16" calcext:value-type="float">
            <text:p>16.00</text:p>
          </table:table-cell>
          <table:table-cell table:style-name="ce248"/>
          <table:table-cell table:number-columns-repeated="16377"/>
        </table:table-row>
        <table:table-row table:style-name="ro1">
          <table:table-cell/>
          <table:table-cell table:style-name="ce251" office:value-type="string" calcext:value-type="string">
            <text:p>Pagamento PVC 237 ml</text:p>
          </table:table-cell>
          <table:table-cell table:style-name="ce260" office:value-type="string" calcext:value-type="string">
            <text:p>und</text:p>
          </table:table-cell>
          <table:table-cell table:style-name="ce260" office:value-type="float" office:value="8" calcext:value-type="float">
            <text:p>8</text:p>
          </table:table-cell>
          <table:table-cell table:style-name="ce260" office:value-type="float" office:value="12" calcext:value-type="float">
            <text:p>12</text:p>
          </table:table-cell>
          <table:table-cell table:style-name="ce270" table:formula="of:=+[.E52]*[.D52]" office:value-type="float" office:value="96" calcext:value-type="float">
            <text:p>96.00</text:p>
          </table:table-cell>
          <table:table-cell table:style-name="ce248"/>
          <table:table-cell table:number-columns-repeated="16377"/>
        </table:table-row>
        <table:table-row table:style-name="ro1">
          <table:table-cell/>
          <table:table-cell table:style-name="ce248"/>
          <table:table-cell table:style-name="ce258" table:number-columns-repeated="2"/>
          <table:table-cell table:style-name="ce267" office:value-type="string" calcext:value-type="string">
            <text:p>TOTAL</text:p>
          </table:table-cell>
          <table:table-cell table:style-name="ce271" table:formula="of:=SUM([.F43:.F52])" office:value-type="float" office:value="9792" calcext:value-type="float">
            <text:p>9,792.00</text:p>
          </table:table-cell>
          <table:table-cell table:style-name="ce248"/>
          <table:table-cell table:number-columns-repeated="16377"/>
        </table:table-row>
        <table:table-row table:style-name="ro1" table:number-rows-repeated="66">
          <table:table-cell/>
          <table:table-cell table:style-name="ce248"/>
          <table:table-cell table:style-name="ce258" table:number-columns-repeated="4"/>
          <table:table-cell table:style-name="ce248"/>
          <table:table-cell table:number-columns-repeated="16377"/>
        </table:table-row>
        <table:table-row table:style-name="ro1" table:number-rows-repeated="1048456">
          <table:table-cell table:number-columns-repeated="16384"/>
        </table:table-row>
        <table:table-row table:style-name="ro1">
          <table:table-cell table:number-columns-repeated="16384"/>
        </table:table-row>
        <table:named-expressions>
          <table:named-range table:name="_xlnm.Print_Area" table:base-cell-address="$POBLACION.$A$1" table:cell-range-address="$'TERREN Y OBR CIV'.$B$2:.$F$36" table:range-usable-as="print-range"/>
        </table:named-expressions>
      </table:table>
      <table:table table:name="MUEB, MAQ,EQUIP" table:style-name="ta7" table:print-ranges="'MUEB, MAQ,EQUIP'.B1:'MUEB, MAQ,EQUIP'.F52">
        <table:table-column table:style-name="co1" table:default-cell-style-name="ce287"/>
        <table:table-column table:style-name="co53" table:default-cell-style-name="ce287"/>
        <table:table-column table:style-name="co54" table:default-cell-style-name="ce287"/>
        <table:table-column table:style-name="co9" table:default-cell-style-name="ce304"/>
        <table:table-column table:style-name="co55" table:default-cell-style-name="ce304"/>
        <table:table-column table:style-name="co19" table:default-cell-style-name="ce287"/>
        <table:table-column table:style-name="co1" table:default-cell-style-name="ce287"/>
        <table:table-column table:style-name="co5" table:number-columns-repeated="2" table:default-cell-style-name="ce287"/>
        <table:table-column table:style-name="co1" table:number-columns-repeated="16375" table:default-cell-style-name="ce287"/>
        <table:table-row table:style-name="ro1">
          <table:table-cell table:number-columns-repeated="16384"/>
        </table:table-row>
        <table:table-row table:style-name="ro1">
          <table:table-cell/>
          <table:table-cell table:style-name="ce290" office:value-type="string" calcext:value-type="string">
            <text:p><text:s text:c="58"/>MAQUINARIA Y EQUIPO</text:p>
          </table:table-cell>
          <table:table-cell table:style-name="ce290"/>
          <table:table-cell table:number-columns-repeated="16381"/>
        </table:table-row>
        <table:table-row table:style-name="ro13">
          <table:table-cell table:style-name="ce288"/>
          <table:table-cell table:style-name="ce291" office:value-type="string" calcext:value-type="string">
            <text:p>DESCRIPCION</text:p>
          </table:table-cell>
          <table:table-cell table:style-name="ce291" office:value-type="string" calcext:value-type="string">
            <text:p>UNIDAD</text:p>
          </table:table-cell>
          <table:table-cell table:style-name="ce291" office:value-type="string" calcext:value-type="string">
            <text:p>CANTIDAD</text:p>
          </table:table-cell>
          <table:table-cell table:style-name="ce291" office:value-type="string" calcext:value-type="string">
            <text:p>VALOR UNITARIO</text:p>
          </table:table-cell>
          <table:table-cell table:style-name="ce291" office:value-type="string" calcext:value-type="string">
            <text:p>TOTAL</text:p>
          </table:table-cell>
          <table:table-cell table:style-name="ce325" table:number-columns-repeated="3"/>
          <table:table-cell table:style-name="ce288" table:number-columns-repeated="16375"/>
        </table:table-row>
        <table:table-row table:style-name="ro1">
          <table:table-cell/>
          <table:table-cell table:style-name="ce292" office:value-type="string" calcext:value-type="string">
            <text:p>MAQUINARIA</text:p>
          </table:table-cell>
          <table:table-cell table:style-name="ce292"/>
          <table:table-cell table:style-name="ce58" table:number-columns-repeated="2"/>
          <table:table-cell table:style-name="ce316" table:formula="of:=SUM([.F5:.F5])" office:value-type="float" office:value="750" calcext:value-type="float">
            <text:p><text:s/>750.00 </text:p>
          </table:table-cell>
          <table:table-cell table:style-name="ce298" table:number-columns-repeated="3"/>
          <table:table-cell table:number-columns-repeated="16375"/>
        </table:table-row>
        <table:table-row table:style-name="ro1">
          <table:table-cell/>
          <table:table-cell table:style-name="ce293" office:value-type="string" calcext:value-type="string">
            <text:p>Herramientas Manuales</text:p>
          </table:table-cell>
          <table:table-cell table:style-name="ce302" office:value-type="string" calcext:value-type="string">
            <text:p>Gbl</text:p>
          </table:table-cell>
          <table:table-cell table:style-name="ce305" office:value-type="float" office:value="1" calcext:value-type="float">
            <text:p>1.00</text:p>
          </table:table-cell>
          <table:table-cell table:style-name="ce312" office:value-type="float" office:value="750" calcext:value-type="float">
            <text:p>750.00</text:p>
          </table:table-cell>
          <table:table-cell table:style-name="ce317" table:formula="of:=[.D5]*[.E5]" office:value-type="float" office:value="750" calcext:value-type="float">
            <text:p><text:s/>750.00 </text:p>
          </table:table-cell>
          <table:table-cell/>
          <table:table-cell table:style-name="ce331"/>
          <table:table-cell table:style-name="ce298"/>
          <table:table-cell table:number-columns-repeated="16375"/>
        </table:table-row>
        <table:table-row table:style-name="ro1">
          <table:table-cell/>
          <table:table-cell table:style-name="ce292" office:value-type="string" calcext:value-type="string">
            <text:p>EQUIPOS</text:p>
          </table:table-cell>
          <table:table-cell table:style-name="ce292"/>
          <table:table-cell table:style-name="ce306" table:number-columns-repeated="2"/>
          <table:table-cell table:style-name="ce316" table:formula="of:=SUM([.F7:.F15])" office:value-type="float" office:value="25504" calcext:value-type="float">
            <text:p><text:s/>25,504.00 </text:p>
          </table:table-cell>
          <table:table-cell table:style-name="ce326"/>
          <table:table-cell table:style-name="ce331"/>
          <table:table-cell table:style-name="ce326"/>
          <table:table-cell table:style-name="ce290" table:number-columns-repeated="16375"/>
        </table:table-row>
        <table:table-row table:style-name="ro1">
          <table:table-cell/>
          <table:table-cell table:style-name="ce293" office:value-type="string" calcext:value-type="string">
            <text:p>Jabas Plasticas <text:s/>para manejo <text:s/>35*52*36</text:p>
          </table:table-cell>
          <table:table-cell table:style-name="ce302" office:value-type="string" calcext:value-type="string">
            <text:p>und</text:p>
          </table:table-cell>
          <table:table-cell table:style-name="ce307" table:formula="of:=8*10" office:value-type="float" office:value="80" calcext:value-type="float">
            <text:p>80.00</text:p>
          </table:table-cell>
          <table:table-cell table:style-name="ce312" office:value-type="float" office:value="18" calcext:value-type="float">
            <text:p>18.00</text:p>
          </table:table-cell>
          <table:table-cell table:style-name="ce317" table:formula="of:=[.D7]*[.E7]" office:value-type="float" office:value="1440" calcext:value-type="float">
            <text:p><text:s/>1,440.00 </text:p>
          </table:table-cell>
          <table:table-cell table:style-name="ce326" table:formula="of:=+[.D7]/31" office:value-type="float" office:value="2.58064516129032" calcext:value-type="float">
            <text:p>2.58064516129032</text:p>
          </table:table-cell>
          <table:table-cell table:style-name="ce331"/>
          <table:table-cell table:style-name="ce326"/>
          <table:table-cell table:style-name="ce290" table:number-columns-repeated="16375"/>
        </table:table-row>
        <table:table-row table:style-name="ro13">
          <table:table-cell/>
          <table:table-cell table:style-name="ce293" office:value-type="string" calcext:value-type="string">
            <text:p>Gazaperas galv. para cuyes 38 cm diam 21 cm de altura</text:p>
          </table:table-cell>
          <table:table-cell table:style-name="ce302" office:value-type="string" calcext:value-type="string">
            <text:p>und</text:p>
          </table:table-cell>
          <table:table-cell table:style-name="ce307" table:formula="of:=8*22" office:value-type="float" office:value="176" calcext:value-type="float">
            <text:p>176.00</text:p>
          </table:table-cell>
          <table:table-cell table:style-name="ce312" office:value-type="float" office:value="15" calcext:value-type="float">
            <text:p>15.00</text:p>
          </table:table-cell>
          <table:table-cell table:style-name="ce317" table:formula="of:=[.D8]*[.E8]" office:value-type="float" office:value="2640" calcext:value-type="float">
            <text:p><text:s/>2,640.00 </text:p>
          </table:table-cell>
          <table:table-cell table:style-name="ce326" table:formula="of:=+[.D8]/31" office:value-type="float" office:value="5.67741935483871" calcext:value-type="float">
            <text:p>5.67741935483871</text:p>
          </table:table-cell>
          <table:table-cell table:style-name="ce331"/>
          <table:table-cell table:style-name="ce326"/>
          <table:table-cell table:style-name="ce290" table:number-columns-repeated="16375"/>
        </table:table-row>
        <table:table-row table:style-name="ro1">
          <table:table-cell/>
          <table:table-cell table:style-name="ce293" office:value-type="string" calcext:value-type="string">
            <text:p>Comederos de <text:s/>tipo tolva de aluminio cap.6 kg</text:p>
          </table:table-cell>
          <table:table-cell table:style-name="ce302" office:value-type="string" calcext:value-type="string">
            <text:p>und</text:p>
          </table:table-cell>
          <table:table-cell table:style-name="ce307" table:formula="of:=8*22" office:value-type="float" office:value="176" calcext:value-type="float">
            <text:p>176.00</text:p>
          </table:table-cell>
          <table:table-cell table:style-name="ce312" office:value-type="float" office:value="14" calcext:value-type="float">
            <text:p>14.00</text:p>
          </table:table-cell>
          <table:table-cell table:style-name="ce317" table:formula="of:=[.D9]*[.E9]" office:value-type="float" office:value="2464" calcext:value-type="float">
            <text:p><text:s/>2,464.00 </text:p>
          </table:table-cell>
          <table:table-cell table:style-name="ce326" table:formula="of:=+[.D9]/31" office:value-type="float" office:value="5.67741935483871" calcext:value-type="float">
            <text:p>5.67741935483871</text:p>
          </table:table-cell>
          <table:table-cell table:style-name="ce331"/>
          <table:table-cell table:style-name="ce326"/>
          <table:table-cell table:style-name="ce290" table:number-columns-repeated="16375"/>
        </table:table-row>
        <table:table-row table:style-name="ro1">
          <table:table-cell/>
          <table:table-cell table:style-name="ce293" office:value-type="string" calcext:value-type="string">
            <text:p>Forrajera galvanizada </text:p>
          </table:table-cell>
          <table:table-cell table:style-name="ce302" office:value-type="string" calcext:value-type="string">
            <text:p>und</text:p>
          </table:table-cell>
          <table:table-cell table:style-name="ce307" table:formula="of:=8*22" office:value-type="float" office:value="176" calcext:value-type="float">
            <text:p>176.00</text:p>
          </table:table-cell>
          <table:table-cell table:style-name="ce312" office:value-type="float" office:value="15" calcext:value-type="float">
            <text:p>15.00</text:p>
          </table:table-cell>
          <table:table-cell table:style-name="ce317" table:formula="of:=[.D10]*[.E10]" office:value-type="float" office:value="2640" calcext:value-type="float">
            <text:p><text:s/>2,640.00 </text:p>
          </table:table-cell>
          <table:table-cell table:style-name="ce326" table:formula="of:=+[.D10]/31" office:value-type="float" office:value="5.67741935483871" calcext:value-type="float">
            <text:p>5.67741935483871</text:p>
          </table:table-cell>
          <table:table-cell table:style-name="ce331"/>
          <table:table-cell table:style-name="ce332"/>
          <table:table-cell table:style-name="ce290" table:number-columns-repeated="16375"/>
        </table:table-row>
        <table:table-row table:style-name="ro1">
          <table:table-cell/>
          <table:table-cell table:style-name="ce293" office:value-type="string" calcext:value-type="string">
            <text:p>Jabas de transporte 58*83*13 cm</text:p>
          </table:table-cell>
          <table:table-cell table:style-name="ce302" office:value-type="string" calcext:value-type="string">
            <text:p>und</text:p>
          </table:table-cell>
          <table:table-cell table:style-name="ce307" table:formula="of:=8*5" office:value-type="float" office:value="40" calcext:value-type="float">
            <text:p>40.00</text:p>
          </table:table-cell>
          <table:table-cell table:style-name="ce312" office:value-type="float" office:value="70" calcext:value-type="float">
            <text:p>70.00</text:p>
          </table:table-cell>
          <table:table-cell table:style-name="ce317" table:formula="of:=[.D11]*[.E11]" office:value-type="float" office:value="2800" calcext:value-type="float">
            <text:p><text:s/>2,800.00 </text:p>
          </table:table-cell>
          <table:table-cell table:style-name="ce326" table:formula="of:=+[.D11]/31" office:value-type="float" office:value="1.29032258064516" calcext:value-type="float">
            <text:p>1.29032258064516</text:p>
          </table:table-cell>
          <table:table-cell table:style-name="ce331"/>
          <table:table-cell table:style-name="ce332"/>
          <table:table-cell table:style-name="ce290" table:number-columns-repeated="16375"/>
        </table:table-row>
        <table:table-row table:style-name="ro1">
          <table:table-cell/>
          <table:table-cell table:style-name="ce293" office:value-type="string" calcext:value-type="string">
            <text:p>Termometro ambiental con maximi y minimo </text:p>
          </table:table-cell>
          <table:table-cell table:style-name="ce302" office:value-type="string" calcext:value-type="string">
            <text:p>und</text:p>
          </table:table-cell>
          <table:table-cell table:style-name="ce307" office:value-type="float" office:value="8" calcext:value-type="float">
            <text:p>8.00</text:p>
          </table:table-cell>
          <table:table-cell table:style-name="ce312" office:value-type="float" office:value="60" calcext:value-type="float">
            <text:p>60.00</text:p>
          </table:table-cell>
          <table:table-cell table:style-name="ce317" table:formula="of:=[.D12]*[.E12]" office:value-type="float" office:value="480" calcext:value-type="float">
            <text:p><text:s/>480.00 </text:p>
          </table:table-cell>
          <table:table-cell table:style-name="ce326" table:formula="of:=+[.D12]/31" office:value-type="float" office:value="0.258064516129032" calcext:value-type="float">
            <text:p>0.258064516129032</text:p>
          </table:table-cell>
          <table:table-cell table:style-name="ce331"/>
          <table:table-cell table:style-name="ce332"/>
          <table:table-cell table:style-name="ce290" table:number-columns-repeated="16375"/>
        </table:table-row>
        <table:table-row table:style-name="ro1">
          <table:table-cell/>
          <table:table-cell table:style-name="ce293" office:value-type="string" calcext:value-type="string">
            <text:p>Balanza digital de 20 kg</text:p>
          </table:table-cell>
          <table:table-cell table:style-name="ce302" office:value-type="string" calcext:value-type="string">
            <text:p>und</text:p>
          </table:table-cell>
          <table:table-cell table:style-name="ce307" office:value-type="float" office:value="8" calcext:value-type="float">
            <text:p>8.00</text:p>
          </table:table-cell>
          <table:table-cell table:style-name="ce312" office:value-type="float" office:value="130" calcext:value-type="float">
            <text:p>130.00</text:p>
          </table:table-cell>
          <table:table-cell table:style-name="ce317" table:formula="of:=[.D13]*[.E13]" office:value-type="float" office:value="1040" calcext:value-type="float">
            <text:p><text:s/>1,040.00 </text:p>
          </table:table-cell>
          <table:table-cell table:style-name="ce326" table:formula="of:=+[.D13]/31" office:value-type="float" office:value="0.258064516129032" calcext:value-type="float">
            <text:p>0.258064516129032</text:p>
          </table:table-cell>
          <table:table-cell table:style-name="ce331"/>
          <table:table-cell table:style-name="ce332"/>
          <table:table-cell table:style-name="ce290" table:number-columns-repeated="16375"/>
        </table:table-row>
        <table:table-row table:style-name="ro1">
          <table:table-cell/>
          <table:table-cell table:style-name="ce294" office:value-type="string" calcext:value-type="string">
            <text:p>Bandeja pregerminadora de plastica 50x36x4cm</text:p>
          </table:table-cell>
          <table:table-cell table:style-name="ce302" office:value-type="string" calcext:value-type="string">
            <text:p>und</text:p>
          </table:table-cell>
          <table:table-cell table:style-name="ce307" table:formula="of:=8*10" office:value-type="float" office:value="80" calcext:value-type="float">
            <text:p>80.00</text:p>
          </table:table-cell>
          <table:table-cell table:style-name="ce312" office:value-type="float" office:value="10" calcext:value-type="float">
            <text:p>10.00</text:p>
          </table:table-cell>
          <table:table-cell table:style-name="ce317" table:formula="of:=[.D14]*[.E14]" office:value-type="float" office:value="800" calcext:value-type="float">
            <text:p><text:s/>800.00 </text:p>
          </table:table-cell>
          <table:table-cell table:style-name="ce326" table:formula="of:=+[.D14]/31" office:value-type="float" office:value="2.58064516129032" calcext:value-type="float">
            <text:p>2.58064516129032</text:p>
          </table:table-cell>
          <table:table-cell table:style-name="ce331"/>
          <table:table-cell table:style-name="ce332"/>
          <table:table-cell table:style-name="ce290" table:number-columns-repeated="16375"/>
        </table:table-row>
        <table:table-row table:style-name="ro1">
          <table:table-cell/>
          <table:table-cell table:style-name="ce293" office:value-type="string" calcext:value-type="string">
            <text:p>Motocarga</text:p>
          </table:table-cell>
          <table:table-cell table:style-name="ce302" office:value-type="string" calcext:value-type="string">
            <text:p>und</text:p>
          </table:table-cell>
          <table:table-cell table:style-name="ce305" office:value-type="float" office:value="1" calcext:value-type="float">
            <text:p>1.00</text:p>
          </table:table-cell>
          <table:table-cell table:style-name="ce312" office:value-type="float" office:value="11200" calcext:value-type="float">
            <text:p>11200.00</text:p>
          </table:table-cell>
          <table:table-cell table:style-name="ce317" table:formula="of:=[.D15]*[.E15]" office:value-type="float" office:value="11200" calcext:value-type="float">
            <text:p><text:s/>11,200.00 </text:p>
          </table:table-cell>
          <table:table-cell table:style-name="ce326" table:formula="of:=+[.D15]/31" office:value-type="float" office:value="0.032258064516129" calcext:value-type="float">
            <text:p>0.032258064516129</text:p>
          </table:table-cell>
          <table:table-cell table:style-name="ce326"/>
          <table:table-cell table:style-name="ce332" office:value-type="string" office:string-value="BANDEJA DE PLASTICA 50X36X4CM" calcext:value-type="string">
            <text:p><text:s/>BANDEJA DE PLASTICA 50X36X4CM </text:p>
          </table:table-cell>
          <table:table-cell table:style-name="ce290" table:number-columns-repeated="16375"/>
        </table:table-row>
        <table:table-row table:style-name="ro1" table:visibility="collapse">
          <table:table-cell/>
          <table:table-cell table:style-name="ce295" office:value-type="string" calcext:value-type="string">
            <text:p>EQUIPOS DE OFICINA</text:p>
          </table:table-cell>
          <table:table-cell table:style-name="ce295"/>
          <table:table-cell table:style-name="ce305" table:number-columns-repeated="2"/>
          <table:table-cell table:style-name="ce316" table:formula="of:=SUM([.F17:.F19])" office:value-type="float" office:value="0" calcext:value-type="float">
            <text:p><text:s/>- <text:s text:c="2"/></text:p>
          </table:table-cell>
          <table:table-cell table:style-name="ce298" table:number-columns-repeated="2"/>
          <table:table-cell table:style-name="ce333"/>
          <table:table-cell table:number-columns-repeated="16375"/>
        </table:table-row>
        <table:table-row table:style-name="ro1" table:visibility="collapse">
          <table:table-cell/>
          <table:table-cell table:style-name="ce296" office:value-type="string" calcext:value-type="string">
            <text:p>Equipos de Computo</text:p>
          </table:table-cell>
          <table:table-cell table:style-name="ce302" office:value-type="string" calcext:value-type="string">
            <text:p>und</text:p>
          </table:table-cell>
          <table:table-cell table:style-name="ce305" office:value-type="float" office:value="0" calcext:value-type="float">
            <text:p>0.00</text:p>
          </table:table-cell>
          <table:table-cell table:style-name="ce312" office:value-type="float" office:value="2500" calcext:value-type="float">
            <text:p>2500.00</text:p>
          </table:table-cell>
          <table:table-cell table:style-name="ce317" table:formula="of:=[.D17]*[.E17]" office:value-type="float" office:value="0" calcext:value-type="float">
            <text:p><text:s/>- <text:s text:c="2"/></text:p>
          </table:table-cell>
          <table:table-cell table:style-name="ce298" table:number-columns-repeated="3"/>
          <table:table-cell table:number-columns-repeated="16375"/>
        </table:table-row>
        <table:table-row table:style-name="ro1" table:visibility="collapse">
          <table:table-cell/>
          <table:table-cell table:style-name="ce296" office:value-type="string" calcext:value-type="string">
            <text:p>Impresoras</text:p>
          </table:table-cell>
          <table:table-cell table:style-name="ce302" office:value-type="string" calcext:value-type="string">
            <text:p>und</text:p>
          </table:table-cell>
          <table:table-cell table:style-name="ce305" office:value-type="float" office:value="0" calcext:value-type="float">
            <text:p>0.00</text:p>
          </table:table-cell>
          <table:table-cell table:style-name="ce312" office:value-type="float" office:value="500" calcext:value-type="float">
            <text:p>500.00</text:p>
          </table:table-cell>
          <table:table-cell table:style-name="ce317" table:formula="of:=[.D18]*[.E18]" office:value-type="float" office:value="0" calcext:value-type="float">
            <text:p><text:s/>- <text:s text:c="2"/></text:p>
          </table:table-cell>
          <table:table-cell table:style-name="ce298" table:number-columns-repeated="3"/>
          <table:table-cell table:number-columns-repeated="16375"/>
        </table:table-row>
        <table:table-row table:style-name="ro1" table:visibility="collapse">
          <table:table-cell/>
          <table:table-cell table:style-name="ce296" office:value-type="string" calcext:value-type="string">
            <text:p>Fotocopiadora</text:p>
          </table:table-cell>
          <table:table-cell table:style-name="ce302" office:value-type="string" calcext:value-type="string">
            <text:p>und</text:p>
          </table:table-cell>
          <table:table-cell table:style-name="ce305" office:value-type="float" office:value="0" calcext:value-type="float">
            <text:p>0.00</text:p>
          </table:table-cell>
          <table:table-cell table:style-name="ce312" office:value-type="float" office:value="5000" calcext:value-type="float">
            <text:p>5000.00</text:p>
          </table:table-cell>
          <table:table-cell table:style-name="ce317" table:formula="of:=[.D19]*[.E19]" office:value-type="float" office:value="0" calcext:value-type="float">
            <text:p><text:s/>- <text:s text:c="2"/></text:p>
          </table:table-cell>
          <table:table-cell table:style-name="ce298" table:number-columns-repeated="3"/>
          <table:table-cell table:number-columns-repeated="16375"/>
        </table:table-row>
        <table:table-row table:style-name="ro1">
          <table:table-cell/>
          <table:table-cell table:style-name="ce295" office:value-type="string" calcext:value-type="string">
            <text:p>TOTAL MAQUINARIA <text:s/>Y EQUIPO</text:p>
          </table:table-cell>
          <table:table-cell table:style-name="ce295"/>
          <table:table-cell table:style-name="ce58" table:number-columns-repeated="2"/>
          <table:table-cell table:style-name="ce316" table:formula="of:=[.F4]+[.F6]+[.F16]" office:value-type="float" office:value="26254" calcext:value-type="float">
            <text:p><text:s/>26,254.00 </text:p>
          </table:table-cell>
          <table:table-cell table:style-name="ce298">
            <draw:frame draw:z-index="0" draw:name="Imagen 1" draw:style-name="gr2" draw:text-style-name="P1" svg:width="2.474cm" svg:height="0.475cm" svg:x="0.397cm" svg:y="0.053cm">
              <draw:image xlink:href="Pictures/10000B9800000AD50000023187A6850A.emf" xlink:type="simple" xlink:show="embed" xlink:actuate="onLoad" draw:mime-type="image/x-emf">
                <text:p/>
              </draw:image>
              <draw:image xlink:href="Pictures/100000010000006900000015AE0B812F.png" xlink:type="simple" xlink:show="embed" xlink:actuate="onLoad" draw:mime-type="image/png"/>
            </draw:frame>
          </table:table-cell>
          <table:table-cell table:style-name="ce298"/>
          <table:table-cell table:style-name="ce334" office:value-type="string" office:string-value="Bandeja de plastica 50x36x4cm" calcext:value-type="string">
            <text:p><text:s/>Bandeja de plastica 50x36x4cm </text:p>
          </table:table-cell>
          <table:table-cell/>
          <table:table-cell table:style-name="ce335"/>
          <table:table-cell table:number-columns-repeated="16373"/>
        </table:table-row>
        <table:table-row table:style-name="ro1">
          <table:table-cell table:number-columns-repeated="5"/>
          <table:table-cell office:value-type="float" office:value="48563" calcext:value-type="float">
            <text:p>48563</text:p>
          </table:table-cell>
          <table:table-cell table:style-name="ce298" table:number-columns-repeated="3"/>
          <table:table-cell table:number-columns-repeated="16375"/>
        </table:table-row>
        <table:table-row table:style-name="ro1">
          <table:table-cell table:number-columns-repeated="5"/>
          <table:table-cell table:style-name="ce318" table:formula="of:=+[.F21]-[.F20]" office:value-type="float" office:value="22309" calcext:value-type="float">
            <text:p><text:s/>22,309.00 </text:p>
          </table:table-cell>
          <table:table-cell table:style-name="ce298" table:number-columns-repeated="3"/>
          <table:table-cell table:number-columns-repeated="16375"/>
        </table:table-row>
        <table:table-row table:style-name="ro1">
          <table:table-cell table:number-columns-repeated="6"/>
          <table:table-cell table:style-name="ce298" table:number-columns-repeated="3"/>
          <table:table-cell table:number-columns-repeated="16375"/>
        </table:table-row>
        <table:table-row table:style-name="ro1">
          <table:table-cell table:number-columns-repeated="6"/>
          <table:table-cell table:style-name="ce298" table:number-columns-repeated="2"/>
          <table:table-cell table:style-name="ce334"/>
          <table:table-cell table:style-name="ce335"/>
          <table:table-cell table:number-columns-repeated="16374"/>
        </table:table-row>
        <table:table-row table:style-name="ro1">
          <table:table-cell/>
          <table:table-cell office:value-type="string" calcext:value-type="string">
            <text:p><text:s text:c="68"/>VEHICULOS</text:p>
          </table:table-cell>
          <table:table-cell table:number-columns-repeated="4"/>
          <table:table-cell table:style-name="ce298" table:number-columns-repeated="3"/>
          <table:table-cell table:number-columns-repeated="16375"/>
        </table:table-row>
        <table:table-row table:style-name="ro13">
          <table:table-cell table:style-name="ce289"/>
          <table:table-cell table:style-name="ce297" office:value-type="string" calcext:value-type="string">
            <text:p>DESCRIPCION</text:p>
          </table:table-cell>
          <table:table-cell table:style-name="ce297"/>
          <table:table-cell table:style-name="ce297" office:value-type="string" calcext:value-type="string">
            <text:p>CANTIDAD</text:p>
          </table:table-cell>
          <table:table-cell table:style-name="ce297" office:value-type="string" calcext:value-type="string">
            <text:p>VALOR UNITARIO</text:p>
          </table:table-cell>
          <table:table-cell table:style-name="ce319" office:value-type="string" calcext:value-type="string">
            <text:p>TOTAL</text:p>
          </table:table-cell>
          <table:table-cell table:style-name="ce327" table:number-columns-repeated="3"/>
          <table:table-cell table:style-name="ce289" table:number-columns-repeated="16375"/>
        </table:table-row>
        <table:table-row table:style-name="ro1">
          <table:table-cell table:style-name="ce289"/>
          <table:table-cell table:style-name="ce293" office:value-type="string" calcext:value-type="string">
            <text:p>Camion pequeño de carga</text:p>
          </table:table-cell>
          <table:table-cell table:style-name="ce302" office:value-type="string" calcext:value-type="string">
            <text:p>und</text:p>
          </table:table-cell>
          <table:table-cell table:style-name="ce302" office:value-type="float" office:value="0" calcext:value-type="float">
            <text:p>0</text:p>
          </table:table-cell>
          <table:table-cell table:style-name="ce313" office:value-type="float" office:value="150000" calcext:value-type="float">
            <text:p><text:s/>150,000.00 </text:p>
          </table:table-cell>
          <table:table-cell table:style-name="ce320" table:formula="of:=[.D27]*[.E27]" office:value-type="float" office:value="0" calcext:value-type="float">
            <text:p><text:s/>- <text:s text:c="2"/></text:p>
          </table:table-cell>
          <table:table-cell table:style-name="ce327" table:number-columns-repeated="3"/>
          <table:table-cell table:style-name="ce289" table:number-columns-repeated="16375"/>
        </table:table-row>
        <table:table-row table:style-name="ro1">
          <table:table-cell table:style-name="ce290"/>
          <table:table-cell table:style-name="ce295" office:value-type="string" calcext:value-type="string">
            <text:p>TOTAL VEHICULOS</text:p>
          </table:table-cell>
          <table:table-cell table:style-name="ce295"/>
          <table:table-cell table:style-name="ce308" table:number-columns-repeated="2"/>
          <table:table-cell table:style-name="ce316" table:formula="of:=SUM([.F27])" office:value-type="float" office:value="0" calcext:value-type="float">
            <text:p><text:s/>- <text:s text:c="2"/></text:p>
          </table:table-cell>
          <table:table-cell table:style-name="ce326" table:number-columns-repeated="3"/>
          <table:table-cell table:style-name="ce290" table:number-columns-repeated="16375"/>
        </table:table-row>
        <table:table-row table:style-name="ro1" table:number-rows-repeated="2">
          <table:table-cell/>
          <table:table-cell table:style-name="ce298" table:number-columns-repeated="2"/>
          <table:table-cell table:style-name="ce309" table:number-columns-repeated="2"/>
          <table:table-cell table:style-name="ce298" table:number-columns-repeated="4"/>
          <table:table-cell table:number-columns-repeated="16375"/>
        </table:table-row>
        <table:table-row table:style-name="ro1">
          <table:table-cell/>
          <table:table-cell table:style-name="ce298" table:number-columns-repeated="2"/>
          <table:table-cell/>
          <table:table-cell table:style-name="ce309"/>
          <table:table-cell table:style-name="ce298" table:number-columns-repeated="2"/>
          <table:table-cell table:style-name="ce298" office:value-type="float" office:value="3000" calcext:value-type="float">
            <text:p>3000</text:p>
          </table:table-cell>
          <table:table-cell table:style-name="ce298"/>
          <table:table-cell table:number-columns-repeated="16375"/>
        </table:table-row>
        <table:table-row table:style-name="ro1">
          <table:table-cell/>
          <table:table-cell table:style-name="ce298" office:value-type="string" calcext:value-type="string">
            <text:p><text:s text:c="61"/>MUEBLES Y ENSERES</text:p>
          </table:table-cell>
          <table:table-cell table:style-name="ce298"/>
          <table:table-cell table:style-name="ce309" table:number-columns-repeated="2"/>
          <table:table-cell table:style-name="ce298" table:number-columns-repeated="2"/>
          <table:table-cell table:style-name="ce298" office:value-type="float" office:value="51" calcext:value-type="float">
            <text:p>51</text:p>
          </table:table-cell>
          <table:table-cell table:style-name="ce298" table:formula="of:=+[.H32]/7" office:value-type="float" office:value="7.28571428571429" calcext:value-type="float">
            <text:p>7.28571428571429</text:p>
          </table:table-cell>
          <table:table-cell table:number-columns-repeated="16375"/>
        </table:table-row>
        <table:table-row table:style-name="ro13">
          <table:table-cell table:style-name="ce289"/>
          <table:table-cell table:style-name="ce291" office:value-type="string" calcext:value-type="string">
            <text:p>DESCRIPCION</text:p>
          </table:table-cell>
          <table:table-cell table:style-name="ce291"/>
          <table:table-cell table:style-name="ce291" office:value-type="string" calcext:value-type="string">
            <text:p>CANTIDAD</text:p>
          </table:table-cell>
          <table:table-cell table:style-name="ce291" office:value-type="string" calcext:value-type="string">
            <text:p>VALOR UNITARIO</text:p>
          </table:table-cell>
          <table:table-cell table:style-name="ce291" office:value-type="string" calcext:value-type="string">
            <text:p>TOTAL</text:p>
          </table:table-cell>
          <table:table-cell table:style-name="ce327"/>
          <table:table-cell table:style-name="ce327" office:value-type="float" office:value="9" calcext:value-type="float">
            <text:p>9</text:p>
          </table:table-cell>
          <table:table-cell table:style-name="ce327"/>
          <table:table-cell table:style-name="ce289" table:number-columns-repeated="16375"/>
        </table:table-row>
        <table:table-row table:style-name="ro1">
          <table:table-cell/>
          <table:table-cell table:style-name="ce296" office:value-type="string" calcext:value-type="string">
            <text:p>Reproductor Cuy Hembra</text:p>
          </table:table-cell>
          <table:table-cell table:style-name="ce302" office:value-type="string" calcext:value-type="string">
            <text:p>und</text:p>
          </table:table-cell>
          <table:table-cell table:style-name="ce305" office:value-type="float" office:value="85" calcext:value-type="float">
            <text:p>85.00</text:p>
          </table:table-cell>
          <table:table-cell table:style-name="ce305" office:value-type="float" office:value="50" calcext:value-type="float">
            <text:p>50.00</text:p>
          </table:table-cell>
          <table:table-cell table:style-name="ce321" table:formula="of:=[.D34]*[.E34]" office:value-type="float" office:value="4250" calcext:value-type="float">
            <text:p>4250.00</text:p>
          </table:table-cell>
          <table:table-cell/>
          <table:table-cell office:value-type="float" office:value="15" calcext:value-type="float">
            <text:p>15</text:p>
          </table:table-cell>
          <table:table-cell table:number-columns-repeated="16376"/>
        </table:table-row>
        <table:table-row table:style-name="ro1">
          <table:table-cell/>
          <table:table-cell table:style-name="ce296" office:value-type="string" calcext:value-type="string">
            <text:p>Reproductor Cuy Macho</text:p>
          </table:table-cell>
          <table:table-cell table:style-name="ce302" office:value-type="string" calcext:value-type="string">
            <text:p>und</text:p>
          </table:table-cell>
          <table:table-cell table:style-name="ce305" office:value-type="float" office:value="15" calcext:value-type="float">
            <text:p>15.00</text:p>
          </table:table-cell>
          <table:table-cell table:style-name="ce305" office:value-type="float" office:value="50" calcext:value-type="float">
            <text:p>50.00</text:p>
          </table:table-cell>
          <table:table-cell table:style-name="ce321" table:formula="of:=[.D35]*[.E35]" office:value-type="float" office:value="750" calcext:value-type="float">
            <text:p>750.00</text:p>
          </table:table-cell>
          <table:table-cell table:style-name="ce328"/>
          <table:table-cell table:formula="of:=SUM([.H33:.H34])" office:value-type="float" office:value="24" calcext:value-type="float">
            <text:p>24</text:p>
          </table:table-cell>
          <table:table-cell table:number-columns-repeated="16376"/>
        </table:table-row>
        <table:table-row table:style-name="ro1">
          <table:table-cell/>
          <table:table-cell table:style-name="ce296" office:value-type="string" calcext:value-type="string">
            <text:p>Cartel del Proyecto</text:p>
          </table:table-cell>
          <table:table-cell table:style-name="ce302" office:value-type="string" calcext:value-type="string">
            <text:p>und</text:p>
          </table:table-cell>
          <table:table-cell table:style-name="ce305" office:value-type="float" office:value="1" calcext:value-type="float">
            <text:p>1.00</text:p>
          </table:table-cell>
          <table:table-cell table:style-name="ce305" office:value-type="float" office:value="300" calcext:value-type="float">
            <text:p>300.00</text:p>
          </table:table-cell>
          <table:table-cell table:style-name="ce321" table:formula="of:=[.D36]*[.E36]" office:value-type="float" office:value="300" calcext:value-type="float">
            <text:p>300.00</text:p>
          </table:table-cell>
          <table:table-cell table:number-columns-repeated="16378"/>
        </table:table-row>
        <table:table-row table:style-name="ro1">
          <table:table-cell/>
          <table:table-cell table:style-name="ce295" office:value-type="string" calcext:value-type="string">
            <text:p>TOTAL MUEBLES Y ENSERES</text:p>
          </table:table-cell>
          <table:table-cell table:style-name="ce295"/>
          <table:table-cell table:style-name="ce58" table:number-columns-repeated="2"/>
          <table:table-cell table:style-name="ce316" table:formula="of:=SUM([.F34:.F36])" office:value-type="float" office:value="5300" calcext:value-type="float">
            <text:p><text:s/>5,300.00 </text:p>
          </table:table-cell>
          <table:table-cell table:style-name="ce298"/>
          <table:table-cell table:number-columns-repeated="16377"/>
        </table:table-row>
        <table:table-row table:style-name="ro1">
          <table:table-cell/>
          <table:table-cell table:style-name="ce298" table:number-columns-repeated="2"/>
          <table:table-cell table:style-name="ce309" table:number-columns-repeated="2"/>
          <table:table-cell table:style-name="ce298" table:number-columns-repeated="2"/>
          <table:table-cell table:number-columns-repeated="16377"/>
        </table:table-row>
        <table:table-row table:style-name="ro1">
          <table:table-cell/>
          <table:table-cell table:style-name="ce299" office:value-type="string" calcext:value-type="string">
            <text:p>KIT VETERINARIO</text:p>
          </table:table-cell>
          <table:table-cell table:style-name="ce299" table:number-columns-repeated="4"/>
          <table:table-cell table:style-name="ce298"/>
          <table:table-cell table:number-columns-repeated="16377"/>
        </table:table-row>
        <table:table-row table:style-name="ro1">
          <table:table-cell/>
          <table:table-cell table:style-name="ce300" office:value-type="string" calcext:value-type="string">
            <text:p>DESCRIPCION</text:p>
          </table:table-cell>
          <table:table-cell table:style-name="ce300" office:value-type="string" calcext:value-type="string">
            <text:p>UND</text:p>
          </table:table-cell>
          <table:table-cell table:style-name="ce310" office:value-type="string" calcext:value-type="string">
            <text:p>CANT</text:p>
          </table:table-cell>
          <table:table-cell table:style-name="ce310" office:value-type="string" calcext:value-type="string">
            <text:p>P.U</text:p>
          </table:table-cell>
          <table:table-cell table:style-name="ce300" office:value-type="string" calcext:value-type="string">
            <text:p>PARCIAL</text:p>
          </table:table-cell>
          <table:table-cell table:style-name="ce298"/>
          <table:table-cell table:number-columns-repeated="16377"/>
        </table:table-row>
        <table:table-row table:style-name="ro2">
          <table:table-cell/>
          <table:table-cell table:style-name="ce301" office:value-type="string" calcext:value-type="string">
            <text:p>Botiquín caja de plástico multiuso</text:p>
          </table:table-cell>
          <table:table-cell table:style-name="ce303" office:value-type="string" calcext:value-type="string">
            <text:p>Und</text:p>
          </table:table-cell>
          <table:table-cell table:style-name="ce311" office:value-type="float" office:value="31" calcext:value-type="float">
            <text:p>31.00</text:p>
          </table:table-cell>
          <table:table-cell table:style-name="ce314" office:value-type="float" office:value="15" calcext:value-type="float">
            <text:p><text:s/>15.00 </text:p>
          </table:table-cell>
          <table:table-cell table:style-name="ce322" table:formula="of:=+[.D41]*[.E41]" office:value-type="float" office:value="465" calcext:value-type="float">
            <text:p><text:s/>465.00 </text:p>
          </table:table-cell>
          <table:table-cell table:style-name="ce329" table:formula="of:=29*2" office:value-type="float" office:value="58" calcext:value-type="float">
            <text:p><text:s/>58.00 </text:p>
          </table:table-cell>
          <table:table-cell table:number-columns-repeated="16377"/>
        </table:table-row>
        <table:table-row table:style-name="ro30">
          <table:table-cell/>
          <table:table-cell table:style-name="ce301" office:value-type="string" calcext:value-type="string">
            <text:p>Desinfectante Glutaltex X 250 ML (Glutaraldehído y Dimetil benzil cloruro de Amonio) Laboratorio Drogavet</text:p>
          </table:table-cell>
          <table:table-cell table:style-name="ce303" office:value-type="string" calcext:value-type="string">
            <text:p>Und</text:p>
          </table:table-cell>
          <table:table-cell table:style-name="ce311" office:value-type="float" office:value="31" calcext:value-type="float">
            <text:p>31.00</text:p>
          </table:table-cell>
          <table:table-cell table:style-name="ce315" office:value-type="float" office:value="25" calcext:value-type="float">
            <text:p><text:s/>25.00 </text:p>
          </table:table-cell>
          <table:table-cell table:style-name="ce323" table:formula="of:=+[.D42]*[.E42]" office:value-type="float" office:value="775" calcext:value-type="float">
            <text:p><text:s/>775.00 </text:p>
          </table:table-cell>
          <table:table-cell table:style-name="ce330"/>
          <table:table-cell table:number-columns-repeated="16377"/>
        </table:table-row>
        <table:table-row table:style-name="ro2">
          <table:table-cell/>
          <table:table-cell table:style-name="ce301" office:value-type="string" calcext:value-type="string">
            <text:p>Ubresan en cojines X 100 gramos (ACARICIDA)</text:p>
          </table:table-cell>
          <table:table-cell table:style-name="ce303" office:value-type="string" calcext:value-type="string">
            <text:p>Und</text:p>
          </table:table-cell>
          <table:table-cell table:style-name="ce311" office:value-type="float" office:value="31" calcext:value-type="float">
            <text:p>31.00</text:p>
          </table:table-cell>
          <table:table-cell table:style-name="ce315" office:value-type="float" office:value="5" calcext:value-type="float">
            <text:p><text:s/>5.00 </text:p>
          </table:table-cell>
          <table:table-cell table:style-name="ce323" table:formula="of:=+[.D43]*[.E43]" office:value-type="float" office:value="155" calcext:value-type="float">
            <text:p><text:s/>155.00 </text:p>
          </table:table-cell>
          <table:table-cell table:style-name="ce330"/>
          <table:table-cell table:number-columns-repeated="16377"/>
        </table:table-row>
        <table:table-row table:style-name="ro2">
          <table:table-cell/>
          <table:table-cell table:style-name="ce301" office:value-type="string" calcext:value-type="string">
            <text:p>Floxivet 10% + B12 X <text:s/>20 ml- laboratorio Labet </text:p>
          </table:table-cell>
          <table:table-cell table:style-name="ce303" office:value-type="string" calcext:value-type="string">
            <text:p>Und</text:p>
          </table:table-cell>
          <table:table-cell table:style-name="ce311" office:value-type="float" office:value="31" calcext:value-type="float">
            <text:p>31.00</text:p>
          </table:table-cell>
          <table:table-cell table:style-name="ce315" office:value-type="float" office:value="7" calcext:value-type="float">
            <text:p><text:s/>7.00 </text:p>
          </table:table-cell>
          <table:table-cell table:style-name="ce323" table:formula="of:=+[.D44]*[.E44]" office:value-type="float" office:value="217" calcext:value-type="float">
            <text:p><text:s/>217.00 </text:p>
          </table:table-cell>
          <table:table-cell table:style-name="ce330"/>
          <table:table-cell table:number-columns-repeated="16377"/>
        </table:table-row>
        <table:table-row table:style-name="ro2">
          <table:table-cell/>
          <table:table-cell table:style-name="ce301" office:value-type="string" calcext:value-type="string">
            <text:p>Sulfaquinoxalina <text:s/>sulfanox® x 30 ml - <text:s/>labet</text:p>
          </table:table-cell>
          <table:table-cell table:style-name="ce303" office:value-type="string" calcext:value-type="string">
            <text:p>Und</text:p>
          </table:table-cell>
          <table:table-cell table:style-name="ce311" office:value-type="float" office:value="31" calcext:value-type="float">
            <text:p>31.00</text:p>
          </table:table-cell>
          <table:table-cell table:style-name="ce315" office:value-type="float" office:value="7" calcext:value-type="float">
            <text:p><text:s/>7.00 </text:p>
          </table:table-cell>
          <table:table-cell table:style-name="ce323" table:formula="of:=+[.D45]*[.E45]" office:value-type="float" office:value="217" calcext:value-type="float">
            <text:p><text:s/>217.00 </text:p>
          </table:table-cell>
          <table:table-cell table:style-name="ce330"/>
          <table:table-cell table:number-columns-repeated="16377"/>
        </table:table-row>
        <table:table-row table:style-name="ro2">
          <table:table-cell/>
          <table:table-cell table:style-name="ce301" office:value-type="string" calcext:value-type="string">
            <text:p>Ivergold 1.5 % X 20 ml - labet</text:p>
          </table:table-cell>
          <table:table-cell table:style-name="ce303" office:value-type="string" calcext:value-type="string">
            <text:p>Und</text:p>
          </table:table-cell>
          <table:table-cell table:style-name="ce311" office:value-type="float" office:value="31" calcext:value-type="float">
            <text:p>31.00</text:p>
          </table:table-cell>
          <table:table-cell table:style-name="ce315" office:value-type="float" office:value="18" calcext:value-type="float">
            <text:p><text:s/>18.00 </text:p>
          </table:table-cell>
          <table:table-cell table:style-name="ce323" table:formula="of:=+[.D46]*[.E46]" office:value-type="float" office:value="558" calcext:value-type="float">
            <text:p><text:s/>558.00 </text:p>
          </table:table-cell>
          <table:table-cell table:style-name="ce330"/>
          <table:table-cell table:number-columns-repeated="16377"/>
        </table:table-row>
        <table:table-row table:style-name="ro2">
          <table:table-cell/>
          <table:table-cell table:style-name="ce301" office:value-type="string" calcext:value-type="string">
            <text:p>Algodones CKF X 100 gr</text:p>
          </table:table-cell>
          <table:table-cell table:style-name="ce303" office:value-type="string" calcext:value-type="string">
            <text:p>Und</text:p>
          </table:table-cell>
          <table:table-cell table:style-name="ce311" office:value-type="float" office:value="31" calcext:value-type="float">
            <text:p>31.00</text:p>
          </table:table-cell>
          <table:table-cell table:style-name="ce315" office:value-type="float" office:value="6" calcext:value-type="float">
            <text:p><text:s/>6.00 </text:p>
          </table:table-cell>
          <table:table-cell table:style-name="ce323" table:formula="of:=+[.D47]*[.E47]" office:value-type="float" office:value="186" calcext:value-type="float">
            <text:p><text:s/>186.00 </text:p>
          </table:table-cell>
          <table:table-cell table:style-name="ce330"/>
          <table:table-cell table:number-columns-repeated="16377"/>
        </table:table-row>
        <table:table-row table:style-name="ro31">
          <table:table-cell/>
          <table:table-cell table:style-name="ce301" office:value-type="string" calcext:value-type="string">
            <text:p>Tintura de Yodo al 10% - Frasco de 100 ml - uso veterinario</text:p>
          </table:table-cell>
          <table:table-cell table:style-name="ce303" office:value-type="string" calcext:value-type="string">
            <text:p>Und</text:p>
          </table:table-cell>
          <table:table-cell table:style-name="ce311" office:value-type="float" office:value="31" calcext:value-type="float">
            <text:p>31.00</text:p>
          </table:table-cell>
          <table:table-cell table:style-name="ce315" office:value-type="float" office:value="10" calcext:value-type="float">
            <text:p><text:s/>10.00 </text:p>
          </table:table-cell>
          <table:table-cell table:style-name="ce323" table:formula="of:=+[.D48]*[.E48]" office:value-type="float" office:value="310" calcext:value-type="float">
            <text:p><text:s/>310.00 </text:p>
          </table:table-cell>
          <table:table-cell table:style-name="ce330"/>
          <table:table-cell table:number-columns-repeated="16377"/>
        </table:table-row>
        <table:table-row table:style-name="ro2">
          <table:table-cell/>
          <table:table-cell table:style-name="ce301" office:value-type="string" calcext:value-type="string">
            <text:p>Malathion <text:s/>x kg </text:p>
          </table:table-cell>
          <table:table-cell table:style-name="ce303" office:value-type="string" calcext:value-type="string">
            <text:p>Und</text:p>
          </table:table-cell>
          <table:table-cell table:style-name="ce311" office:value-type="float" office:value="31" calcext:value-type="float">
            <text:p>31.00</text:p>
          </table:table-cell>
          <table:table-cell table:style-name="ce315" office:value-type="float" office:value="14" calcext:value-type="float">
            <text:p><text:s/>14.00 </text:p>
          </table:table-cell>
          <table:table-cell table:style-name="ce323" table:formula="of:=+[.D49]*[.E49]" office:value-type="float" office:value="434" calcext:value-type="float">
            <text:p><text:s/>434.00 </text:p>
          </table:table-cell>
          <table:table-cell table:style-name="ce330"/>
          <table:table-cell table:number-columns-repeated="16377"/>
        </table:table-row>
        <table:table-row table:style-name="ro2">
          <table:table-cell/>
          <table:table-cell table:style-name="ce301" office:value-type="string" calcext:value-type="string">
            <text:p>Tintura ganoderma x 50 ml Montana</text:p>
          </table:table-cell>
          <table:table-cell table:style-name="ce303" office:value-type="string" calcext:value-type="string">
            <text:p>Und</text:p>
          </table:table-cell>
          <table:table-cell table:style-name="ce311" office:value-type="float" office:value="31" calcext:value-type="float">
            <text:p>31.00</text:p>
          </table:table-cell>
          <table:table-cell table:style-name="ce315" office:value-type="float" office:value="17" calcext:value-type="float">
            <text:p><text:s/>17.00 </text:p>
          </table:table-cell>
          <table:table-cell table:style-name="ce323" table:formula="of:=+[.D50]*[.E50]" office:value-type="float" office:value="527" calcext:value-type="float">
            <text:p><text:s/>527.00 </text:p>
          </table:table-cell>
          <table:table-cell table:style-name="ce330"/>
          <table:table-cell table:number-columns-repeated="16377"/>
        </table:table-row>
        <table:table-row table:style-name="ro31">
          <table:table-cell/>
          <table:table-cell table:style-name="ce301" office:value-type="string" calcext:value-type="string">
            <text:p>Fipronil <text:s/>mas abamenctina <text:s/>ectopro <text:s text:c="2"/>fy 300 ml montana </text:p>
          </table:table-cell>
          <table:table-cell table:style-name="ce303" office:value-type="string" calcext:value-type="string">
            <text:p>Und</text:p>
          </table:table-cell>
          <table:table-cell table:style-name="ce311" office:value-type="float" office:value="31" calcext:value-type="float">
            <text:p>31.00</text:p>
          </table:table-cell>
          <table:table-cell table:style-name="ce315" office:value-type="float" office:value="10" calcext:value-type="float">
            <text:p><text:s/>10.00 </text:p>
          </table:table-cell>
          <table:table-cell table:style-name="ce323" table:formula="of:=+[.D51]*[.E51]" office:value-type="float" office:value="310" calcext:value-type="float">
            <text:p><text:s/>310.00 </text:p>
          </table:table-cell>
          <table:table-cell table:style-name="ce330"/>
          <table:table-cell table:number-columns-repeated="16377"/>
        </table:table-row>
        <table:table-row table:style-name="ro1">
          <table:table-cell table:number-columns-repeated="4"/>
          <table:table-cell table:style-name="ce58" office:value-type="string" calcext:value-type="string">
            <text:p>TOTAL</text:p>
          </table:table-cell>
          <table:table-cell table:style-name="ce324" table:formula="of:=SUM([.F41:.F51])" office:value-type="float" office:value="4154" calcext:value-type="float">
            <text:p><text:s/>4,154.00 </text:p>
          </table:table-cell>
          <table:table-cell table:style-name="ce298"/>
          <table:table-cell table:number-columns-repeated="16377"/>
        </table:table-row>
        <table:table-row table:style-name="ro1">
          <table:table-cell table:number-columns-repeated="6"/>
          <table:table-cell table:style-name="ce298"/>
          <table:table-cell table:number-columns-repeated="16377"/>
        </table:table-row>
        <table:table-row table:style-name="ro1" table:number-rows-repeated="1048522">
          <table:table-cell table:number-columns-repeated="16384"/>
        </table:table-row>
        <table:table-row table:style-name="ro1">
          <table:table-cell table:number-columns-repeated="16384"/>
        </table:table-row>
        <table:named-expressions>
          <table:named-range table:name="_xlnm.Print_Area" table:base-cell-address="$POBLACION.$A$1" table:cell-range-address="$'MUEB, MAQ,EQUIP'.$B$1:.$F$52" table:range-usable-as="print-range"/>
        </table:named-expressions>
      </table:table>
      <table:table table:name="INVERS FIJ INTANG" table:style-name="ta8" table:print-ranges="'INVERS FIJ INTANG'.A1:'INVERS FIJ INTANG'.E9">
        <table:table-column table:style-name="co56" table:default-cell-style-name="ce336"/>
        <table:table-column table:style-name="co30" table:default-cell-style-name="ce336"/>
        <table:table-column table:style-name="co11" table:default-cell-style-name="ce336"/>
        <table:table-column table:style-name="co57" table:default-cell-style-name="ce336"/>
        <table:table-column table:style-name="co58" table:default-cell-style-name="ce336"/>
        <table:table-column table:style-name="co1" table:number-columns-repeated="16379" table:default-cell-style-name="ce336"/>
        <table:table-row table:style-name="ro1">
          <table:table-cell table:number-columns-repeated="16384"/>
        </table:table-row>
        <table:table-row table:style-name="ro1">
          <table:table-cell table:style-name="ce56" office:value-type="string" calcext:value-type="string" table:number-columns-spanned="5" table:number-rows-spanned="1">
            <text:p>INVERSION FIJA INTANGIBLE</text:p>
          </table:table-cell>
          <table:covered-table-cell table:number-columns-repeated="4" table:style-name="ce56"/>
          <table:table-cell table:number-columns-repeated="16379"/>
        </table:table-row>
        <table:table-row table:style-name="ro2">
          <table:table-cell table:style-name="ce51" office:value-type="string" calcext:value-type="string">
            <text:p>DESCRIPCION</text:p>
          </table:table-cell>
          <table:table-cell table:style-name="ce51" office:value-type="string" calcext:value-type="string">
            <text:p>UNIDAD</text:p>
          </table:table-cell>
          <table:table-cell table:style-name="ce51" office:value-type="string" calcext:value-type="string">
            <text:p>CANTIDAD</text:p>
          </table:table-cell>
          <table:table-cell table:style-name="ce51" office:value-type="string" calcext:value-type="string">
            <text:p>COSTO UNITARIO</text:p>
          </table:table-cell>
          <table:table-cell table:style-name="ce51" office:value-type="string" calcext:value-type="string">
            <text:p>TOTAL</text:p>
          </table:table-cell>
          <table:table-cell table:style-name="ce344" table:number-columns-repeated="4"/>
        </table:table-row>
        <table:table-row table:style-name="ro14">
          <table:table-cell table:style-name="ce337" office:value-type="string" calcext:value-type="string">
            <text:p>Asistencia Tecnica</text:p>
          </table:table-cell>
          <table:table-cell table:style-name="ce337" office:value-type="string" calcext:value-type="string">
            <text:p>mes</text:p>
          </table:table-cell>
          <table:table-cell table:style-name="ce305" office:value-type="float" office:value="5" calcext:value-type="float">
            <text:p>5.00</text:p>
          </table:table-cell>
          <table:table-cell table:style-name="ce305" office:value-type="float" office:value="3000" calcext:value-type="float">
            <text:p>3000.00</text:p>
          </table:table-cell>
          <table:table-cell table:style-name="ce342" table:formula="of:=+[.D4]*[.C4]" office:value-type="float" office:value="15000" calcext:value-type="float">
            <text:p><text:s/>15,000.00 </text:p>
          </table:table-cell>
          <table:table-cell table:number-columns-repeated="2" table:style-name="ce339" office:value-type="float" office:value="0" calcext:value-type="float">
            <text:p>0</text:p>
          </table:table-cell>
          <table:table-cell table:style-name="ce339" table:formula="of:=+[.F4]+[.G4]" office:value-type="float" office:value="0" calcext:value-type="float">
            <text:p>0</text:p>
          </table:table-cell>
          <table:table-cell table:style-name="ce339"/>
          <table:table-cell table:number-columns-repeated="16375"/>
        </table:table-row>
        <table:table-row table:style-name="ro14">
          <table:table-cell table:style-name="ce337" office:value-type="string" calcext:value-type="string">
            <text:p>Publicidad y Marketing</text:p>
          </table:table-cell>
          <table:table-cell table:style-name="ce337" office:value-type="string" calcext:value-type="string">
            <text:p>mes</text:p>
          </table:table-cell>
          <table:table-cell table:style-name="ce305" office:value-type="float" office:value="5" calcext:value-type="float">
            <text:p>5.00</text:p>
          </table:table-cell>
          <table:table-cell table:style-name="ce305" office:value-type="float" office:value="350" calcext:value-type="float">
            <text:p>350.00</text:p>
          </table:table-cell>
          <table:table-cell table:style-name="ce342" table:formula="of:=+[.D5]*[.C5]" office:value-type="float" office:value="1750" calcext:value-type="float">
            <text:p><text:s/>1,750.00 </text:p>
          </table:table-cell>
          <table:table-cell table:style-name="ce339" table:number-columns-repeated="4"/>
          <table:table-cell table:number-columns-repeated="16375"/>
        </table:table-row>
        <table:table-row table:style-name="ro14">
          <table:table-cell table:style-name="ce337" office:value-type="string" calcext:value-type="string">
            <text:p>Flete Terrestre</text:p>
          </table:table-cell>
          <table:table-cell table:style-name="ce337" office:value-type="string" calcext:value-type="string">
            <text:p>Gbl</text:p>
          </table:table-cell>
          <table:table-cell table:style-name="ce305" office:value-type="float" office:value="1" calcext:value-type="float">
            <text:p>1.00</text:p>
          </table:table-cell>
          <table:table-cell table:style-name="ce305" office:value-type="float" office:value="1500" calcext:value-type="float">
            <text:p>1500.00</text:p>
          </table:table-cell>
          <table:table-cell table:style-name="ce342" table:formula="of:=+[.D6]*[.C6]" office:value-type="float" office:value="1500" calcext:value-type="float">
            <text:p><text:s/>1,500.00 </text:p>
          </table:table-cell>
          <table:table-cell table:style-name="ce339" table:number-columns-repeated="4"/>
          <table:table-cell table:number-columns-repeated="16375"/>
        </table:table-row>
        <table:table-row table:style-name="ro1">
          <table:table-cell table:style-name="ce338" office:value-type="string" calcext:value-type="string" table:number-columns-spanned="4" table:number-rows-spanned="1">
            <text:p>TOTAL INVERSION FIJA INTANGIBLE</text:p>
          </table:table-cell>
          <table:covered-table-cell table:number-columns-repeated="2" table:style-name="ce340"/>
          <table:covered-table-cell table:style-name="ce341"/>
          <table:table-cell table:style-name="ce343" table:formula="of:=SUM([.E4:.E6])" office:value-type="float" office:value="18250" calcext:value-type="float">
            <text:p><text:s/>18,250.00 </text:p>
          </table:table-cell>
          <table:table-cell table:style-name="ce339" table:number-columns-repeated="2"/>
          <table:table-cell table:style-name="ce343" table:formula="of:=SUM([.H4:.H4])" office:value-type="float" office:value="0" calcext:value-type="float">
            <text:p><text:s/>- <text:s text:c="2"/></text:p>
          </table:table-cell>
          <table:table-cell table:style-name="ce345" table:formula="of:=+[.E7]-[.H7]" office:value-type="float" office:value="18250" calcext:value-type="float">
            <text:p><text:s/>18,250.00 </text:p>
          </table:table-cell>
          <table:table-cell table:number-columns-repeated="16375"/>
        </table:table-row>
        <table:table-row table:style-name="ro1" table:number-rows-repeated="3">
          <table:table-cell table:style-name="ce339" table:number-columns-repeated="9"/>
          <table:table-cell table:number-columns-repeated="16375"/>
        </table:table-row>
        <table:table-row table:style-name="ro1">
          <table:table-cell table:style-name="ce339" table:number-columns-repeated="5"/>
          <table:table-cell table:style-name="ce339" table:formula="of:=900/5" office:value-type="float" office:value="180" calcext:value-type="float">
            <text:p>180</text:p>
          </table:table-cell>
          <table:table-cell table:style-name="ce339" table:number-columns-repeated="3"/>
          <table:table-cell table:number-columns-repeated="16375"/>
        </table:table-row>
        <table:table-row table:style-name="ro1" table:number-rows-repeated="7">
          <table:table-cell table:style-name="ce339" table:number-columns-repeated="9"/>
          <table:table-cell table:number-columns-repeated="16375"/>
        </table:table-row>
        <table:table-row table:style-name="ro1" table:number-rows-repeated="1048557">
          <table:table-cell table:number-columns-repeated="16384"/>
        </table:table-row>
        <table:table-row table:style-name="ro1">
          <table:table-cell table:number-columns-repeated="16384"/>
        </table:table-row>
        <table:named-expressions>
          <table:named-range table:name="_xlnm.Print_Area" table:base-cell-address="$POBLACION.$A$1" table:cell-range-address="$'INVERS FIJ INTANG'.$A$1:.$E$9" table:range-usable-as="print-range"/>
        </table:named-expressions>
      </table:table>
      <table:table table:name="REMUNERACION" table:style-name="ta9" table:print-ranges="REMUNERACION.A2:REMUNERACION.F14">
        <table:table-column table:style-name="co59" table:default-cell-style-name="ce336"/>
        <table:table-column table:style-name="co13" table:default-cell-style-name="ce336"/>
        <table:table-column table:style-name="co60" table:number-columns-repeated="2" table:default-cell-style-name="ce336"/>
        <table:table-column table:style-name="co11" table:default-cell-style-name="ce336"/>
        <table:table-column table:style-name="co51" table:default-cell-style-name="ce336"/>
        <table:table-column table:style-name="co1" table:number-columns-repeated="16378" table:default-cell-style-name="ce336"/>
        <table:table-row table:style-name="ro1" table:number-rows-repeated="2">
          <table:table-cell table:number-columns-repeated="16384"/>
        </table:table-row>
        <table:table-row table:style-name="ro1">
          <table:table-cell table:style-name="ce56" office:value-type="string" calcext:value-type="string" table:number-columns-spanned="6" table:number-rows-spanned="1">
            <text:p>REQUERIMIENTOS Y REMUNERACION <text:s/>DEL PERSONAL</text:p>
          </table:table-cell>
          <table:covered-table-cell table:number-columns-repeated="5" table:style-name="ce56"/>
          <table:table-cell table:number-columns-repeated="16378"/>
        </table:table-row>
        <table:table-row table:style-name="ro13">
          <table:table-cell table:style-name="ce291" office:value-type="string" calcext:value-type="string">
            <text:p>PERSONAL</text:p>
          </table:table-cell>
          <table:table-cell table:style-name="ce291" office:value-type="string" calcext:value-type="string">
            <text:p>Indice de participacion</text:p>
          </table:table-cell>
          <table:table-cell table:style-name="ce291" office:value-type="string" calcext:value-type="string">
            <text:p>Cantidad</text:p>
          </table:table-cell>
          <table:table-cell table:style-name="ce291" office:value-type="string" calcext:value-type="string">
            <text:p>Costo Unitario</text:p>
          </table:table-cell>
          <table:table-cell table:style-name="ce291" office:value-type="string" calcext:value-type="string">
            <text:p>Costo mensual (S/.)</text:p>
          </table:table-cell>
          <table:table-cell table:style-name="ce291" office:value-type="string" calcext:value-type="string">
            <text:p>Costo Total Anual <text:s/>(S/.)</text:p>
          </table:table-cell>
          <table:table-cell table:style-name="ce359" table:number-columns-repeated="16378"/>
        </table:table-row>
        <table:table-row table:style-name="ro1">
          <table:table-cell table:style-name="ce346" office:value-type="string" calcext:value-type="string">
            <text:p>MANO DE OBRA DIRECTA</text:p>
          </table:table-cell>
          <table:table-cell table:style-name="ce351" table:number-columns-repeated="4"/>
          <table:table-cell table:style-name="ce355" table:formula="of:=SUM([.F6:.F7])" office:value-type="float" office:value="12960" calcext:value-type="float">
            <text:p><text:s/>12,960.00 </text:p>
          </table:table-cell>
          <table:table-cell table:style-name="ce360" table:number-columns-repeated="16378"/>
        </table:table-row>
        <table:table-row table:style-name="ro1">
          <table:table-cell table:style-name="ce337" office:value-type="string" calcext:value-type="string">
            <text:p>Personal Encargado de alimentación y limpieza</text:p>
          </table:table-cell>
          <table:table-cell table:number-columns-repeated="2" table:style-name="ce352" office:value-type="float" office:value="1" calcext:value-type="float">
            <text:p>1</text:p>
          </table:table-cell>
          <table:table-cell table:style-name="ce352" office:value-type="float" office:value="1000" calcext:value-type="float">
            <text:p>1000</text:p>
          </table:table-cell>
          <table:table-cell table:style-name="ce354" table:formula="of:=[.C6]*[.D6]*[.B6]" office:value-type="float" office:value="1000" calcext:value-type="float">
            <text:p><text:s/>1,000.00 </text:p>
          </table:table-cell>
          <table:table-cell table:style-name="ce354" table:formula="of:=[.E6]*12" office:value-type="float" office:value="12000" calcext:value-type="float">
            <text:p><text:s/>12,000.00 </text:p>
          </table:table-cell>
          <table:table-cell table:number-columns-repeated="16378"/>
        </table:table-row>
        <table:table-row table:style-name="ro1">
          <table:table-cell table:style-name="ce337" office:value-type="string" calcext:value-type="string">
            <text:p>Personal de apoyo</text:p>
          </table:table-cell>
          <table:table-cell table:style-name="ce352" office:value-type="float" office:value="0.08" calcext:value-type="float">
            <text:p>0.08</text:p>
          </table:table-cell>
          <table:table-cell table:style-name="ce352" office:value-type="float" office:value="1" calcext:value-type="float">
            <text:p>1</text:p>
          </table:table-cell>
          <table:table-cell table:style-name="ce352" office:value-type="float" office:value="1000" calcext:value-type="float">
            <text:p>1000</text:p>
          </table:table-cell>
          <table:table-cell table:style-name="ce354" table:formula="of:=[.C7]*[.D7]*[.B7]" office:value-type="float" office:value="80" calcext:value-type="float">
            <text:p><text:s/>80.00 </text:p>
          </table:table-cell>
          <table:table-cell table:style-name="ce354" table:formula="of:=[.E7]*12" office:value-type="float" office:value="960" calcext:value-type="float">
            <text:p><text:s/>960.00 </text:p>
          </table:table-cell>
          <table:table-cell table:number-columns-repeated="16378"/>
        </table:table-row>
        <table:table-row table:style-name="ro1">
          <table:table-cell table:style-name="ce347" office:value-type="string" calcext:value-type="string">
            <text:p>MANO DE OBRA INDIRECTA</text:p>
          </table:table-cell>
          <table:table-cell table:style-name="ce353" table:number-columns-repeated="3"/>
          <table:table-cell table:style-name="ce354"/>
          <table:table-cell table:style-name="ce356" table:formula="of:=SUM([.F9:.F9])" office:value-type="float" office:value="1800" calcext:value-type="float">
            <text:p><text:s/>1,800.00 </text:p>
          </table:table-cell>
          <table:table-cell table:style-name="ce360" table:number-columns-repeated="16378"/>
        </table:table-row>
        <table:table-row table:style-name="ro1">
          <table:table-cell table:style-name="ce337" office:value-type="string" calcext:value-type="string">
            <text:p>Personal Encargado de Produccion</text:p>
          </table:table-cell>
          <table:table-cell table:style-name="ce352" office:value-type="float" office:value="0.1" calcext:value-type="float">
            <text:p>0.1</text:p>
          </table:table-cell>
          <table:table-cell table:style-name="ce352" office:value-type="float" office:value="1" calcext:value-type="float">
            <text:p>1</text:p>
          </table:table-cell>
          <table:table-cell table:style-name="ce352" office:value-type="float" office:value="1500" calcext:value-type="float">
            <text:p>1500</text:p>
          </table:table-cell>
          <table:table-cell table:style-name="ce354" table:formula="of:=[.C9]*[.D9]*[.B9]" office:value-type="float" office:value="150" calcext:value-type="float">
            <text:p><text:s/>150.00 </text:p>
          </table:table-cell>
          <table:table-cell table:style-name="ce354" table:formula="of:=[.E9]*12" office:value-type="float" office:value="1800" calcext:value-type="float">
            <text:p><text:s/>1,800.00 </text:p>
          </table:table-cell>
          <table:table-cell table:number-columns-repeated="16378"/>
        </table:table-row>
        <table:table-row table:style-name="ro1">
          <table:table-cell table:style-name="ce348" office:value-type="string" calcext:value-type="string">
            <text:p>MANO DE OBRA VENTA</text:p>
          </table:table-cell>
          <table:table-cell table:style-name="ce353" table:number-columns-repeated="3"/>
          <table:table-cell table:style-name="ce354"/>
          <table:table-cell table:style-name="ce356" table:formula="of:=[.F11]" office:value-type="float" office:value="1152" calcext:value-type="float">
            <text:p><text:s/>1,152.00 </text:p>
          </table:table-cell>
          <table:table-cell table:number-columns-repeated="16378"/>
        </table:table-row>
        <table:table-row table:style-name="ro1">
          <table:table-cell table:style-name="ce349" office:value-type="string" calcext:value-type="string">
            <text:p>Personal Encargado de la Venta</text:p>
          </table:table-cell>
          <table:table-cell table:style-name="ce352" office:value-type="float" office:value="0.08" calcext:value-type="float">
            <text:p>0.08</text:p>
          </table:table-cell>
          <table:table-cell table:style-name="ce352" office:value-type="float" office:value="1" calcext:value-type="float">
            <text:p>1</text:p>
          </table:table-cell>
          <table:table-cell table:style-name="ce352" office:value-type="float" office:value="1200" calcext:value-type="float">
            <text:p>1200</text:p>
          </table:table-cell>
          <table:table-cell table:style-name="ce354" table:formula="of:=[.C11]*[.D11]*[.B11]" office:value-type="float" office:value="96" calcext:value-type="float">
            <text:p><text:s/>96.00 </text:p>
          </table:table-cell>
          <table:table-cell table:style-name="ce354" table:formula="of:=+[.E11]*12" office:value-type="float" office:value="1152" calcext:value-type="float">
            <text:p><text:s/>1,152.00 </text:p>
          </table:table-cell>
          <table:table-cell table:number-columns-repeated="16378"/>
        </table:table-row>
        <table:table-row table:style-name="ro1">
          <table:table-cell table:style-name="ce348" office:value-type="string" calcext:value-type="string">
            <text:p>MANO DE OBRA ADMINISTRATIVA</text:p>
          </table:table-cell>
          <table:table-cell table:style-name="ce353" table:number-columns-repeated="3"/>
          <table:table-cell table:style-name="ce354"/>
          <table:table-cell table:style-name="ce356" table:formula="of:=SUM([.F13:.F13])" office:value-type="float" office:value="1728" calcext:value-type="float">
            <text:p><text:s/>1,728.00 </text:p>
          </table:table-cell>
          <table:table-cell table:style-name="ce360" table:number-columns-repeated="2"/>
          <table:table-cell table:style-name="ce361"/>
          <table:table-cell table:style-name="ce360" table:number-columns-repeated="16375"/>
        </table:table-row>
        <table:table-row table:style-name="ro1">
          <table:table-cell table:style-name="ce350" office:value-type="string" calcext:value-type="string">
            <text:p>Junta Directiva Asociación</text:p>
          </table:table-cell>
          <table:table-cell table:style-name="ce352" office:value-type="float" office:value="0.08" calcext:value-type="float">
            <text:p>0.08</text:p>
          </table:table-cell>
          <table:table-cell table:style-name="ce352" office:value-type="float" office:value="1" calcext:value-type="float">
            <text:p>1</text:p>
          </table:table-cell>
          <table:table-cell table:style-name="ce352" office:value-type="float" office:value="1800" calcext:value-type="float">
            <text:p>1800</text:p>
          </table:table-cell>
          <table:table-cell table:style-name="ce354" table:formula="of:=[.C13]*[.D13]*[.B13]" office:value-type="float" office:value="144" calcext:value-type="float">
            <text:p><text:s/>144.00 </text:p>
          </table:table-cell>
          <table:table-cell table:style-name="ce357" table:formula="of:=[.E13]*12" office:value-type="float" office:value="1728" calcext:value-type="float">
            <text:p><text:s/>1,728.00 </text:p>
          </table:table-cell>
          <table:table-cell table:number-columns-repeated="16378"/>
        </table:table-row>
        <table:table-row table:style-name="ro1">
          <table:table-cell table:style-name="ce347" office:value-type="string" calcext:value-type="string">
            <text:p>COSTO TOTAL</text:p>
          </table:table-cell>
          <table:table-cell table:style-name="ce353" table:number-columns-repeated="4"/>
          <table:table-cell table:style-name="ce356" table:formula="of:=[.F12]+[.F8]+[.F5]+[.F10]" office:value-type="float" office:value="17640" calcext:value-type="float">
            <text:p><text:s/>17,640.00 </text:p>
          </table:table-cell>
          <table:table-cell table:style-name="ce360" table:number-columns-repeated="16378"/>
        </table:table-row>
        <table:table-row table:style-name="ro1">
          <table:table-cell table:style-name="ce339" table:number-columns-repeated="7"/>
          <table:table-cell table:number-columns-repeated="16377"/>
        </table:table-row>
        <table:table-row table:style-name="ro1">
          <table:table-cell table:style-name="ce339" table:number-columns-repeated="5"/>
          <table:table-cell table:style-name="ce339" office:value-type="float" office:value="115.18" calcext:value-type="float">
            <text:p>115.18</text:p>
          </table:table-cell>
          <table:table-cell table:style-name="ce339"/>
          <table:table-cell table:number-columns-repeated="16377"/>
        </table:table-row>
        <table:table-row table:style-name="ro1">
          <table:table-cell table:style-name="ce339" table:number-columns-repeated="7"/>
          <table:table-cell table:number-columns-repeated="16377"/>
        </table:table-row>
        <table:table-row table:style-name="ro1">
          <table:table-cell table:style-name="ce339" table:number-columns-repeated="5"/>
          <table:table-cell table:style-name="ce358" table:formula="of:=+[.E9]+[.F16]" office:value-type="float" office:value="265.18" calcext:value-type="float">
            <text:p><text:s/>265.18 </text:p>
          </table:table-cell>
          <table:table-cell table:style-name="ce339"/>
          <table:table-cell table:number-columns-repeated="16377"/>
        </table:table-row>
        <table:table-row table:style-name="ro1">
          <table:table-cell table:style-name="ce339" table:number-columns-repeated="5"/>
          <table:table-cell table:style-name="ce339" table:formula="of:=+[.F18]/[.D9]" office:value-type="float" office:value="0.176786666666667" calcext:value-type="float">
            <text:p>0.176786666666667</text:p>
          </table:table-cell>
          <table:table-cell table:style-name="ce339"/>
          <table:table-cell table:number-columns-repeated="16377"/>
        </table:table-row>
        <table:table-row table:style-name="ro1">
          <table:table-cell table:style-name="ce339" table:number-columns-repeated="7"/>
          <table:table-cell table:number-columns-repeated="16377"/>
        </table:table-row>
        <table:table-row table:style-name="ro1" table:number-rows-repeated="1048555">
          <table:table-cell table:number-columns-repeated="16384"/>
        </table:table-row>
        <table:table-row table:style-name="ro1">
          <table:table-cell table:number-columns-repeated="16384"/>
        </table:table-row>
        <table:named-expressions>
          <table:named-range table:name="_xlnm.Print_Area" table:base-cell-address="$POBLACION.$A$1" table:cell-range-address="$REMUNERACION.$A$2:.$F$14" table:range-usable-as="print-range"/>
        </table:named-expressions>
      </table:table>
      <table:table table:name="CAP TRABAJ" table:style-name="ta10" table:print-ranges="'CAP TRABAJ'.A1:'CAP TRABAJ'.G46">
        <table:table-column table:style-name="co61" table:default-cell-style-name="ce336"/>
        <table:table-column table:style-name="co13" table:default-cell-style-name="ce336"/>
        <table:table-column table:style-name="co58" table:default-cell-style-name="ce336"/>
        <table:table-column table:style-name="co62" table:number-columns-repeated="2" table:default-cell-style-name="ce336"/>
        <table:table-column table:style-name="co58" table:number-columns-repeated="2" table:default-cell-style-name="ce336"/>
        <table:table-column table:style-name="co20" table:default-cell-style-name="ce336"/>
        <table:table-column table:style-name="co36" table:default-cell-style-name="ce336"/>
        <table:table-column table:style-name="co63" table:default-cell-style-name="ce336"/>
        <table:table-column table:style-name="co1" table:number-columns-repeated="16374" table:default-cell-style-name="ce336"/>
        <table:table-row table:style-name="ro1">
          <table:table-cell table:number-columns-repeated="16384"/>
        </table:table-row>
        <table:table-row table:style-name="ro17">
          <table:table-cell table:style-name="ce362" office:value-type="string" calcext:value-type="string" table:number-columns-spanned="2" table:number-rows-spanned="1">
            <text:p>Ciclo de conversion en efectivo</text:p>
          </table:table-cell>
          <table:covered-table-cell table:style-name="ce367"/>
          <table:table-cell table:number-columns-repeated="16382"/>
        </table:table-row>
        <table:table-row table:style-name="ro1">
          <table:table-cell table:style-name="ce363" office:value-type="string" calcext:value-type="string">
            <text:p>Ciclo de produccion</text:p>
          </table:table-cell>
          <table:table-cell table:style-name="ce363" office:value-type="float" office:value="75" calcext:value-type="float">
            <text:p>75</text:p>
          </table:table-cell>
          <table:table-cell table:style-name="ce376" table:number-columns-repeated="16382"/>
        </table:table-row>
        <table:table-row table:style-name="ro1">
          <table:table-cell table:style-name="ce363" office:value-type="string" calcext:value-type="string">
            <text:p>Ciclo de cobranza</text:p>
          </table:table-cell>
          <table:table-cell table:style-name="ce363" office:value-type="float" office:value="15" calcext:value-type="float">
            <text:p>15</text:p>
          </table:table-cell>
          <table:table-cell table:number-columns-repeated="16382"/>
        </table:table-row>
        <table:table-row table:style-name="ro1">
          <table:table-cell table:style-name="ce363" office:value-type="string" calcext:value-type="string">
            <text:p>Dias de credito proveedores</text:p>
          </table:table-cell>
          <table:table-cell table:style-name="ce363" office:value-type="float" office:value="60" calcext:value-type="float">
            <text:p>60</text:p>
          </table:table-cell>
          <table:table-cell table:number-columns-repeated="16382"/>
        </table:table-row>
        <table:table-row table:style-name="ro1">
          <table:table-cell table:style-name="ce363" office:value-type="string" calcext:value-type="string">
            <text:p>Dias a financiar</text:p>
          </table:table-cell>
          <table:table-cell table:style-name="ce363" table:formula="of:=[.B3]+[.B4]-[.B5]" office:value-type="float" office:value="30" calcext:value-type="float">
            <text:p>30</text:p>
          </table:table-cell>
          <table:table-cell table:number-columns-repeated="16382"/>
        </table:table-row>
        <table:table-row table:style-name="ro1">
          <table:table-cell table:style-name="ce363" office:value-type="string" calcext:value-type="string">
            <text:p>Periodo de desfase</text:p>
          </table:table-cell>
          <table:table-cell table:style-name="ce368" table:formula="of:=[.B6]/360" office:value-type="float" office:value="0.0833333333333333" calcext:value-type="float">
            <text:p>0.083</text:p>
          </table:table-cell>
          <table:table-cell table:number-columns-repeated="16382"/>
        </table:table-row>
        <table:table-row table:style-name="ro1">
          <table:table-cell table:style-name="ce364" table:number-columns-repeated="2"/>
          <table:table-cell table:number-columns-repeated="16382"/>
        </table:table-row>
        <table:table-row table:style-name="ro32">
          <table:table-cell table:style-name="ce365" office:value-type="string" calcext:value-type="string" table:number-columns-spanned="7" table:number-rows-spanned="1">
            <text:p>NOTA: el ciclo productivo es el número de días que va desde el momento en que se compran los insumos hasta que se recibe el pago por la venta del producto que se elaboro con estos insumos, por lo tanto el N° de días a financiar estara determinado por el ciclo de producción + ciclo de cobranza - N° de días de crédito de proveedores, por lo tanto se esta considerando como máximo 360 días.</text:p>
          </table:table-cell>
          <table:covered-table-cell table:number-columns-repeated="5" table:style-name="ce369"/>
          <table:covered-table-cell table:style-name="ce386"/>
          <table:table-cell table:number-columns-repeated="16377"/>
        </table:table-row>
        <table:table-row table:style-name="ro1">
          <table:table-cell table:style-name="ce360" table:number-columns-repeated="16384"/>
        </table:table-row>
        <table:table-row table:style-name="ro1">
          <table:table-cell table:number-columns-repeated="16384"/>
        </table:table-row>
        <table:table-row table:style-name="ro33">
          <table:table-cell/>
          <table:table-cell table:style-name="ce360" office:value-type="string" calcext:value-type="string">
            <text:p><text:s text:c="11"/>CAPITAL DE TRABAJO</text:p>
          </table:table-cell>
          <table:table-cell/>
          <table:table-cell table:style-name="ce378" table:number-columns-repeated="3"/>
          <table:table-cell table:number-columns-repeated="16378"/>
        </table:table-row>
        <table:table-row table:style-name="ro13">
          <table:table-cell table:style-name="ce297" office:value-type="string" calcext:value-type="string">
            <text:p>CONCEPTO</text:p>
          </table:table-cell>
          <table:table-cell table:style-name="ce370" office:value-type="string" calcext:value-type="string">
            <text:p>UNIDAD</text:p>
          </table:table-cell>
          <table:table-cell table:style-name="ce377" office:value-type="string" calcext:value-type="string">
            <text:p>COSTO TOTAL </text:p>
          </table:table-cell>
          <table:table-cell table:style-name="ce379"/>
          <table:table-cell table:style-name="ce383"/>
          <table:table-cell table:style-name="ce378"/>
          <table:table-cell table:number-columns-repeated="16378"/>
        </table:table-row>
        <table:table-row table:style-name="ro1">
          <table:table-cell table:style-name="ce347" office:value-type="string" calcext:value-type="string">
            <text:p>I.MATERIA PRIMAS E INSUMOS</text:p>
          </table:table-cell>
          <table:table-cell table:style-name="ce337"/>
          <table:table-cell table:style-name="ce343" table:formula="of:=SUM([.C15:.C16])" office:value-type="float" office:value="2399.31451534463" calcext:value-type="float">
            <text:p><text:s/>2,399.31 </text:p>
          </table:table-cell>
          <table:table-cell table:style-name="ce380"/>
          <table:table-cell table:style-name="ce384"/>
          <table:table-cell table:style-name="ce378"/>
          <table:table-cell table:number-columns-repeated="16378"/>
        </table:table-row>
        <table:table-row table:style-name="ro1">
          <table:table-cell table:style-name="ce337" office:value-type="string" calcext:value-type="string">
            <text:p>Cuy</text:p>
          </table:table-cell>
          <table:table-cell table:style-name="ce337" office:value-type="string" calcext:value-type="string">
            <text:p>Und</text:p>
          </table:table-cell>
          <table:table-cell table:style-name="ce342" table:formula="of:=[$'COSTO PROD Y OPER'.G39]*[.B7]" office:value-type="float" office:value="2232.64784867796" calcext:value-type="float">
            <text:p><text:s/>2,232.65 </text:p>
          </table:table-cell>
          <table:table-cell table:style-name="ce381"/>
          <table:table-cell table:style-name="ce385"/>
          <table:table-cell table:style-name="ce378"/>
          <table:table-cell table:number-columns-repeated="16378"/>
        </table:table-row>
        <table:table-row table:style-name="ro1">
          <table:table-cell table:style-name="ce337" office:value-type="string" calcext:value-type="string">
            <text:p>Insumos complementarios</text:p>
          </table:table-cell>
          <table:table-cell table:style-name="ce337" office:value-type="string" calcext:value-type="string">
            <text:p>Global</text:p>
          </table:table-cell>
          <table:table-cell table:style-name="ce342" table:formula="of:=[$'COSTO PROD Y OPER'.G40]*[.B7]" office:value-type="float" office:value="166.666666666667" calcext:value-type="float">
            <text:p><text:s/>166.67 </text:p>
          </table:table-cell>
          <table:table-cell table:style-name="ce381"/>
          <table:table-cell table:style-name="ce385"/>
          <table:table-cell table:style-name="ce378"/>
          <table:table-cell table:number-columns-repeated="16378"/>
        </table:table-row>
        <table:table-row table:style-name="ro1">
          <table:table-cell table:style-name="ce347" office:value-type="string" calcext:value-type="string">
            <text:p>II.MANO DE OBRA</text:p>
          </table:table-cell>
          <table:table-cell table:style-name="ce347"/>
          <table:table-cell table:style-name="ce343" table:formula="of:=SUM([.C18:.C21])" office:value-type="float" office:value="1470" calcext:value-type="float">
            <text:p><text:s/>1,470.00 </text:p>
          </table:table-cell>
          <table:table-cell table:style-name="ce382"/>
          <table:table-cell table:style-name="ce378" table:number-columns-repeated="2"/>
          <table:table-cell table:number-columns-repeated="16378"/>
        </table:table-row>
        <table:table-row table:style-name="ro1">
          <table:table-cell table:style-name="ce337" office:value-type="string" calcext:value-type="string">
            <text:p>Mano de Obra Directa</text:p>
          </table:table-cell>
          <table:table-cell table:style-name="ce337"/>
          <table:table-cell table:style-name="ce342" table:formula="of:=+[$REMUNERACION.F5]*[$'CAP TRABAJ'.B7]" office:value-type="float" office:value="1080" calcext:value-type="float">
            <text:p><text:s/>1,080.00 </text:p>
          </table:table-cell>
          <table:table-cell table:style-name="ce382"/>
          <table:table-cell table:style-name="ce378" table:number-columns-repeated="2"/>
          <table:table-cell table:number-columns-repeated="16378"/>
        </table:table-row>
        <table:table-row table:style-name="ro1">
          <table:table-cell table:style-name="ce337" office:value-type="string" calcext:value-type="string">
            <text:p>Mano de Obra Indirecta</text:p>
          </table:table-cell>
          <table:table-cell table:style-name="ce337"/>
          <table:table-cell table:style-name="ce342" table:formula="of:=+[$REMUNERACION.F8]*[$'CAP TRABAJ'.B7]" office:value-type="float" office:value="150" calcext:value-type="float">
            <text:p><text:s/>150.00 </text:p>
          </table:table-cell>
          <table:table-cell table:style-name="ce382"/>
          <table:table-cell table:style-name="ce378" table:number-columns-repeated="2"/>
          <table:table-cell table:number-columns-repeated="16378"/>
        </table:table-row>
        <table:table-row table:style-name="ro1">
          <table:table-cell table:style-name="ce337" office:value-type="string" calcext:value-type="string">
            <text:p>Mano de obra Operación</text:p>
          </table:table-cell>
          <table:table-cell table:style-name="ce337"/>
          <table:table-cell table:style-name="ce342" table:formula="of:=+[$REMUNERACION.F10]*[$'CAP TRABAJ'.B7]" office:value-type="float" office:value="96" calcext:value-type="float">
            <text:p><text:s/>96.00 </text:p>
          </table:table-cell>
          <table:table-cell table:style-name="ce382"/>
          <table:table-cell table:style-name="ce378" table:number-columns-repeated="2"/>
          <table:table-cell table:number-columns-repeated="16378"/>
        </table:table-row>
        <table:table-row table:style-name="ro1">
          <table:table-cell table:style-name="ce337" office:value-type="string" calcext:value-type="string">
            <text:p>Mano de Obra Administrativa</text:p>
          </table:table-cell>
          <table:table-cell table:style-name="ce337"/>
          <table:table-cell table:style-name="ce342" table:formula="of:=+[$REMUNERACION.F12]*[$'CAP TRABAJ'.B7]" office:value-type="float" office:value="144" calcext:value-type="float">
            <text:p><text:s/>144.00 </text:p>
          </table:table-cell>
          <table:table-cell table:style-name="ce382"/>
          <table:table-cell table:style-name="ce378" table:number-columns-repeated="2"/>
          <table:table-cell table:number-columns-repeated="2"/>
          <table:table-cell table:style-name="ce339" table:number-columns-repeated="2"/>
          <table:table-cell table:number-columns-repeated="16374"/>
        </table:table-row>
        <table:table-row table:style-name="ro1">
          <table:table-cell table:style-name="ce347" office:value-type="string" calcext:value-type="string">
            <text:p>III. OTROS BIENES Y SERVICIOS </text:p>
          </table:table-cell>
          <table:table-cell table:style-name="ce337"/>
          <table:table-cell table:style-name="ce343" table:formula="of:=SUM([.C23:.C27])" office:value-type="float" office:value="304.130870178493" calcext:value-type="float">
            <text:p><text:s/>304.13 </text:p>
          </table:table-cell>
          <table:table-cell table:style-name="ce382"/>
          <table:table-cell table:style-name="ce378" table:number-columns-repeated="2"/>
          <table:table-cell table:number-columns-repeated="2"/>
          <table:table-cell table:style-name="ce339" table:number-columns-repeated="2"/>
          <table:table-cell table:number-columns-repeated="16374"/>
        </table:table-row>
        <table:table-row table:style-name="ro1">
          <table:table-cell table:style-name="ce337" office:value-type="string" calcext:value-type="string">
            <text:p>Materiales de empaque </text:p>
          </table:table-cell>
          <table:table-cell table:style-name="ce337" office:value-type="string" calcext:value-type="string">
            <text:p>Global</text:p>
          </table:table-cell>
          <table:table-cell table:style-name="ce342" table:formula="of:=[$'COSTO PROD Y OPER'.E18]*[.B7]" office:value-type="float" office:value="26.5475368451601" calcext:value-type="float">
            <text:p><text:s/>26.55 </text:p>
          </table:table-cell>
          <table:table-cell table:style-name="ce382"/>
          <table:table-cell table:style-name="ce378" table:number-columns-repeated="2"/>
          <table:table-cell table:number-columns-repeated="2"/>
          <table:table-cell table:style-name="ce339" table:number-columns-repeated="2"/>
          <table:table-cell table:number-columns-repeated="16374"/>
        </table:table-row>
        <table:table-row table:style-name="ro1">
          <table:table-cell table:style-name="ce337" office:value-type="string" calcext:value-type="string">
            <text:p>Otros Servicios</text:p>
          </table:table-cell>
          <table:table-cell table:style-name="ce337" office:value-type="string" calcext:value-type="string">
            <text:p>Global</text:p>
          </table:table-cell>
          <table:table-cell table:style-name="ce342" table:formula="of:=+[$'COSTO PROD Y OPER'.B82]*[$'CAP TRABAJ'.B7]" office:value-type="float" office:value="115.583333333333" calcext:value-type="float">
            <text:p><text:s/>115.58 </text:p>
          </table:table-cell>
          <table:table-cell table:style-name="ce382"/>
          <table:table-cell table:style-name="ce378" table:number-columns-repeated="2"/>
          <table:table-cell table:number-columns-repeated="2"/>
          <table:table-cell table:style-name="ce339" table:number-columns-repeated="2"/>
          <table:table-cell table:number-columns-repeated="16374"/>
        </table:table-row>
        <table:table-row table:style-name="ro1">
          <table:table-cell table:style-name="ce337" office:value-type="string" calcext:value-type="string">
            <text:p>Servicios de matenimiento y reparaciones</text:p>
          </table:table-cell>
          <table:table-cell table:style-name="ce337" office:value-type="string" calcext:value-type="string">
            <text:p>Global</text:p>
          </table:table-cell>
          <table:table-cell table:style-name="ce342" table:formula="of:=[$'COSTO PROD Y OPER'.E27]*[.B7]" office:value-type="float" office:value="50" calcext:value-type="float">
            <text:p><text:s/>50.00 </text:p>
          </table:table-cell>
          <table:table-cell table:style-name="ce382"/>
          <table:table-cell table:style-name="ce378" table:number-columns-repeated="2"/>
          <table:table-cell table:number-columns-repeated="2"/>
          <table:table-cell table:style-name="ce339" table:number-columns-repeated="2"/>
          <table:table-cell table:number-columns-repeated="16374"/>
        </table:table-row>
        <table:table-row table:style-name="ro1">
          <table:table-cell table:style-name="ce337" office:value-type="string" calcext:value-type="string">
            <text:p>Servicios basicos</text:p>
          </table:table-cell>
          <table:table-cell table:style-name="ce337" office:value-type="string" calcext:value-type="string">
            <text:p>Global</text:p>
          </table:table-cell>
          <table:table-cell table:style-name="ce342" table:formula="of:=+[$'COSTO PROD Y OPER'.E8]*[$'CAP TRABAJ'.B7]" office:value-type="float" office:value="52" calcext:value-type="float">
            <text:p><text:s/>52.00 </text:p>
          </table:table-cell>
          <table:table-cell table:style-name="ce382"/>
          <table:table-cell table:style-name="ce378" table:number-columns-repeated="2"/>
          <table:table-cell table:number-columns-repeated="2"/>
          <table:table-cell table:style-name="ce339" table:number-columns-repeated="2"/>
          <table:table-cell table:number-columns-repeated="16374"/>
        </table:table-row>
        <table:table-row table:style-name="ro1">
          <table:table-cell table:style-name="ce337" office:value-type="string" calcext:value-type="string">
            <text:p>Utiles de oficina y limpieza</text:p>
          </table:table-cell>
          <table:table-cell table:style-name="ce337" office:value-type="string" calcext:value-type="string">
            <text:p>Global</text:p>
          </table:table-cell>
          <table:table-cell table:style-name="ce342" office:value-type="float" office:value="60" calcext:value-type="float">
            <text:p><text:s/>60.00 </text:p>
          </table:table-cell>
          <table:table-cell table:style-name="ce382"/>
          <table:table-cell table:style-name="ce378" table:number-columns-repeated="2"/>
          <table:table-cell table:number-columns-repeated="2"/>
          <table:table-cell table:style-name="ce339" table:number-columns-repeated="2"/>
          <table:table-cell table:number-columns-repeated="16374"/>
        </table:table-row>
        <table:table-row table:style-name="ro1">
          <table:table-cell table:style-name="ce347" office:value-type="string" calcext:value-type="string">
            <text:p>TOTAL CAPITAL DE TRABAJO</text:p>
          </table:table-cell>
          <table:table-cell table:style-name="ce347"/>
          <table:table-cell table:style-name="ce343" table:formula="of:=[.C14]+[.C17]+[.C22]" office:value-type="float" office:value="4173.44538552312" calcext:value-type="float">
            <text:p><text:s/>4,173.45 </text:p>
          </table:table-cell>
          <table:table-cell table:style-name="ce382"/>
          <table:table-cell table:style-name="ce378" table:number-columns-repeated="2"/>
          <table:table-cell table:number-columns-repeated="2"/>
          <table:table-cell table:style-name="ce339" table:number-columns-repeated="2"/>
          <table:table-cell table:number-columns-repeated="16374"/>
        </table:table-row>
        <table:table-row table:style-name="ro1">
          <table:table-cell table:number-columns-repeated="5"/>
          <table:table-cell table:style-name="ce339"/>
          <table:table-cell table:number-columns-repeated="16378"/>
        </table:table-row>
        <table:table-row table:style-name="ro1">
          <table:table-cell table:style-name="ce291" office:value-type="string" calcext:value-type="string" table:number-columns-spanned="1" table:number-rows-spanned="2">
            <text:p>CONCEPTO</text:p>
          </table:table-cell>
          <table:table-cell table:style-name="ce310" office:value-type="string" calcext:value-type="string" table:number-columns-spanned="6" table:number-rows-spanned="1">
            <text:p>AÑOS</text:p>
          </table:table-cell>
          <table:covered-table-cell table:number-columns-repeated="5" table:style-name="ce310"/>
          <table:table-cell table:number-columns-repeated="16377"/>
        </table:table-row>
        <table:table-row table:style-name="ro1">
          <table:covered-table-cell table:style-name="ce291"/>
          <table:table-cell table:style-name="ce291" office:value-type="float" office:value="0" calcext:value-type="float">
            <text:p>0</text:p>
          </table:table-cell>
          <table:table-cell table:style-name="ce291" office:value-type="float" office:value="1" calcext:value-type="float">
            <text:p>1</text:p>
          </table:table-cell>
          <table:table-cell table:style-name="ce291" office:value-type="float" office:value="2" calcext:value-type="float">
            <text:p>2</text:p>
          </table:table-cell>
          <table:table-cell table:style-name="ce291" office:value-type="float" office:value="3" calcext:value-type="float">
            <text:p>3</text:p>
          </table:table-cell>
          <table:table-cell table:style-name="ce291" office:value-type="float" office:value="4" calcext:value-type="float">
            <text:p>4</text:p>
          </table:table-cell>
          <table:table-cell table:style-name="ce291" office:value-type="float" office:value="5" calcext:value-type="float">
            <text:p>5</text:p>
          </table:table-cell>
          <table:table-cell table:number-columns-repeated="16377"/>
        </table:table-row>
        <table:table-row table:style-name="ro1">
          <table:table-cell table:style-name="ce347" office:value-type="string" calcext:value-type="string">
            <text:p>I.MATERIA PRIMAS E INSUMOS</text:p>
          </table:table-cell>
          <table:table-cell table:style-name="ce371" table:formula="of:=SUM([.B33:.B34])" office:value-type="float" office:value="2399.31451534463" calcext:value-type="float">
            <text:p>2399.31</text:p>
          </table:table-cell>
          <table:table-cell table:style-name="ce371" table:formula="of:=SUM([.C33:.C34])" office:value-type="float" office:value="646.529569735593" calcext:value-type="float">
            <text:p>646.53</text:p>
          </table:table-cell>
          <table:table-cell table:style-name="ce371" table:formula="of:=SUM([.D33:.D34])" office:value-type="float" office:value="775.835483682711" calcext:value-type="float">
            <text:p>775.84</text:p>
          </table:table-cell>
          <table:table-cell table:style-name="ce371" table:formula="of:=SUM([.E33:.E34])" office:value-type="float" office:value="931.002580419253" calcext:value-type="float">
            <text:p>931.00</text:p>
          </table:table-cell>
          <table:table-cell table:style-name="ce371" table:formula="of:=SUM([.F33:.F34])" office:value-type="float" office:value="1117.2030965031" calcext:value-type="float">
            <text:p>1117.20</text:p>
          </table:table-cell>
          <table:table-cell table:style-name="ce371" table:formula="of:=SUM([.G33:.G34])" office:value-type="float" office:value="1340.64371580372" calcext:value-type="float">
            <text:p>1340.64</text:p>
          </table:table-cell>
          <table:table-cell table:number-columns-repeated="16377"/>
        </table:table-row>
        <table:table-row table:style-name="ro1">
          <table:table-cell table:style-name="ce337" office:value-type="string" calcext:value-type="string">
            <text:p>Cuy</text:p>
          </table:table-cell>
          <table:table-cell table:style-name="ce372" table:formula="of:=[.C15]" office:value-type="float" office:value="2232.64784867796" calcext:value-type="float">
            <text:p>2232.65</text:p>
          </table:table-cell>
          <table:table-cell table:style-name="ce372" table:formula="of:=+[.B33]*0.2" office:value-type="float" office:value="446.529569735593" calcext:value-type="float">
            <text:p>446.53</text:p>
          </table:table-cell>
          <table:table-cell table:style-name="ce372" table:formula="of:=+[.C33]*1.2" office:value-type="float" office:value="535.835483682711" calcext:value-type="float">
            <text:p>535.84</text:p>
          </table:table-cell>
          <table:table-cell table:style-name="ce372" table:formula="of:=+[.D33]*1.2" office:value-type="float" office:value="643.002580419253" calcext:value-type="float">
            <text:p>643.00</text:p>
          </table:table-cell>
          <table:table-cell table:style-name="ce372" table:formula="of:=+[.E33]*1.2" office:value-type="float" office:value="771.603096503104" calcext:value-type="float">
            <text:p>771.60</text:p>
          </table:table-cell>
          <table:table-cell table:style-name="ce372" table:formula="of:=+[.F33]*1.2" office:value-type="float" office:value="925.923715803725" calcext:value-type="float">
            <text:p>925.92</text:p>
          </table:table-cell>
          <table:table-cell table:number-columns-repeated="16377"/>
        </table:table-row>
        <table:table-row table:style-name="ro1">
          <table:table-cell table:style-name="ce337" office:value-type="string" calcext:value-type="string">
            <text:p>Insumos complementarios</text:p>
          </table:table-cell>
          <table:table-cell table:style-name="ce372" table:formula="of:=[.C16]" office:value-type="float" office:value="166.666666666667" calcext:value-type="float">
            <text:p>166.67</text:p>
          </table:table-cell>
          <table:table-cell table:style-name="ce372" table:formula="of:=[.B34]*1.2" office:value-type="float" office:value="200" calcext:value-type="float">
            <text:p>200.00</text:p>
          </table:table-cell>
          <table:table-cell table:style-name="ce372" table:formula="of:=[.C34]*1.2" office:value-type="float" office:value="240" calcext:value-type="float">
            <text:p>240.00</text:p>
          </table:table-cell>
          <table:table-cell table:style-name="ce372" table:formula="of:=[.D34]*1.2" office:value-type="float" office:value="288" calcext:value-type="float">
            <text:p>288.00</text:p>
          </table:table-cell>
          <table:table-cell table:style-name="ce372" table:formula="of:=[.E34]*1.2" office:value-type="float" office:value="345.6" calcext:value-type="float">
            <text:p>345.60</text:p>
          </table:table-cell>
          <table:table-cell table:style-name="ce372" table:formula="of:=[.F34]*1.2" office:value-type="float" office:value="414.72" calcext:value-type="float">
            <text:p>414.72</text:p>
          </table:table-cell>
          <table:table-cell table:number-columns-repeated="16377"/>
        </table:table-row>
        <table:table-row table:style-name="ro1">
          <table:table-cell table:style-name="ce347" office:value-type="string" calcext:value-type="string">
            <text:p>II. MANO DE OBRA</text:p>
          </table:table-cell>
          <table:table-cell table:style-name="ce373" table:formula="of:=SUM([.B36:.B39])" office:value-type="float" office:value="1470" calcext:value-type="float">
            <text:p>1470.00</text:p>
          </table:table-cell>
          <table:table-cell table:style-name="ce373" table:number-columns-repeated="5"/>
          <table:table-cell table:number-columns-repeated="16377"/>
        </table:table-row>
        <table:table-row table:style-name="ro1">
          <table:table-cell table:style-name="ce337" office:value-type="string" calcext:value-type="string">
            <text:p>Mano de Obra Directa</text:p>
          </table:table-cell>
          <table:table-cell table:style-name="ce374" table:formula="of:=[.C18]" office:value-type="float" office:value="1080" calcext:value-type="float">
            <text:p>1080.00</text:p>
          </table:table-cell>
          <table:table-cell table:style-name="ce374" table:number-columns-repeated="4"/>
          <table:table-cell table:style-name="ce372"/>
          <table:table-cell table:number-columns-repeated="16377"/>
        </table:table-row>
        <table:table-row table:style-name="ro1">
          <table:table-cell table:style-name="ce337" office:value-type="string" calcext:value-type="string">
            <text:p>Mano de Obra Indirecta</text:p>
          </table:table-cell>
          <table:table-cell table:style-name="ce374" table:formula="of:=[.C19]" office:value-type="float" office:value="150" calcext:value-type="float">
            <text:p>150.00</text:p>
          </table:table-cell>
          <table:table-cell table:style-name="ce374" table:number-columns-repeated="4"/>
          <table:table-cell table:style-name="ce372"/>
          <table:table-cell table:number-columns-repeated="16377"/>
        </table:table-row>
        <table:table-row table:style-name="ro1">
          <table:table-cell table:style-name="ce337" office:value-type="string" calcext:value-type="string">
            <text:p>Mano de obra Operación</text:p>
          </table:table-cell>
          <table:table-cell table:style-name="ce374" table:formula="of:=[.C20]" office:value-type="float" office:value="96" calcext:value-type="float">
            <text:p>96.00</text:p>
          </table:table-cell>
          <table:table-cell table:style-name="ce374" table:number-columns-repeated="4"/>
          <table:table-cell table:style-name="ce372"/>
          <table:table-cell table:number-columns-repeated="16377"/>
        </table:table-row>
        <table:table-row table:style-name="ro1">
          <table:table-cell table:style-name="ce337" office:value-type="string" calcext:value-type="string">
            <text:p>Mano de Obra Administrativa</text:p>
          </table:table-cell>
          <table:table-cell table:style-name="ce374" table:formula="of:=[.C21]" office:value-type="float" office:value="144" calcext:value-type="float">
            <text:p>144.00</text:p>
          </table:table-cell>
          <table:table-cell table:style-name="ce374" table:number-columns-repeated="4"/>
          <table:table-cell table:style-name="ce372"/>
          <table:table-cell table:number-columns-repeated="16377"/>
        </table:table-row>
        <table:table-row table:style-name="ro1">
          <table:table-cell table:style-name="ce347" office:value-type="string" calcext:value-type="string">
            <text:p>III. OTROS BIENES Y SERVICIOS </text:p>
          </table:table-cell>
          <table:table-cell table:style-name="ce373" table:formula="of:=SUM([.B41:.B45])" office:value-type="float" office:value="304.130870178493" calcext:value-type="float">
            <text:p>304.13</text:p>
          </table:table-cell>
          <table:table-cell table:style-name="ce373" table:formula="of:=SUM([.C41:.C45])" office:value-type="float" office:value="170.557044214192" calcext:value-type="float">
            <text:p>170.56</text:p>
          </table:table-cell>
          <table:table-cell table:style-name="ce373" table:formula="of:=SUM([.D41:.D45])" office:value-type="float" office:value="204.668453057031" calcext:value-type="float">
            <text:p>204.67</text:p>
          </table:table-cell>
          <table:table-cell table:style-name="ce373" table:formula="of:=SUM([.E41:.E45])" office:value-type="float" office:value="245.602143668437" calcext:value-type="float">
            <text:p>245.60</text:p>
          </table:table-cell>
          <table:table-cell table:style-name="ce373" table:formula="of:=SUM([.F41:.F45])" office:value-type="float" office:value="294.722572402124" calcext:value-type="float">
            <text:p>294.72</text:p>
          </table:table-cell>
          <table:table-cell table:style-name="ce373" table:formula="of:=SUM([.G41:.G45])" office:value-type="float" office:value="353.667086882549" calcext:value-type="float">
            <text:p>353.67</text:p>
          </table:table-cell>
          <table:table-cell table:number-columns-repeated="16377"/>
        </table:table-row>
        <table:table-row table:style-name="ro1">
          <table:table-cell table:style-name="ce337" office:value-type="string" calcext:value-type="string">
            <text:p>Materiales de empaque </text:p>
          </table:table-cell>
          <table:table-cell table:style-name="ce372" table:formula="of:=[.C23]" office:value-type="float" office:value="26.5475368451601" calcext:value-type="float">
            <text:p>26.55</text:p>
          </table:table-cell>
          <table:table-cell table:style-name="ce372" table:formula="of:=[.B41]*1.2" office:value-type="float" office:value="31.8570442141921" calcext:value-type="float">
            <text:p>31.86</text:p>
          </table:table-cell>
          <table:table-cell table:style-name="ce372" table:formula="of:=[.C41]*1.2" office:value-type="float" office:value="38.2284530570305" calcext:value-type="float">
            <text:p>38.23</text:p>
          </table:table-cell>
          <table:table-cell table:style-name="ce372" table:formula="of:=[.D41]*1.2" office:value-type="float" office:value="45.8741436684366" calcext:value-type="float">
            <text:p>45.87</text:p>
          </table:table-cell>
          <table:table-cell table:style-name="ce372" table:formula="of:=[.E41]*1.2" office:value-type="float" office:value="55.0489724021239" calcext:value-type="float">
            <text:p>55.05</text:p>
          </table:table-cell>
          <table:table-cell table:style-name="ce372" table:formula="of:=[.F41]*1.2" office:value-type="float" office:value="66.0587668825487" calcext:value-type="float">
            <text:p>66.06</text:p>
          </table:table-cell>
          <table:table-cell table:number-columns-repeated="16377"/>
        </table:table-row>
        <table:table-row table:style-name="ro1">
          <table:table-cell table:style-name="ce337" office:value-type="string" calcext:value-type="string">
            <text:p>Flete terrestre</text:p>
          </table:table-cell>
          <table:table-cell table:style-name="ce372" table:formula="of:=[.C24]" office:value-type="float" office:value="115.583333333333" calcext:value-type="float">
            <text:p>115.58</text:p>
          </table:table-cell>
          <table:table-cell table:style-name="ce372" table:formula="of:=[.B42]*1.2" office:value-type="float" office:value="138.7" calcext:value-type="float">
            <text:p>138.70</text:p>
          </table:table-cell>
          <table:table-cell table:style-name="ce372" table:formula="of:=[.C42]*1.2" office:value-type="float" office:value="166.44" calcext:value-type="float">
            <text:p>166.44</text:p>
          </table:table-cell>
          <table:table-cell table:style-name="ce372" table:formula="of:=[.D42]*1.2" office:value-type="float" office:value="199.728" calcext:value-type="float">
            <text:p>199.73</text:p>
          </table:table-cell>
          <table:table-cell table:style-name="ce372" table:formula="of:=[.E42]*1.2" office:value-type="float" office:value="239.6736" calcext:value-type="float">
            <text:p>239.67</text:p>
          </table:table-cell>
          <table:table-cell table:style-name="ce372" table:formula="of:=[.F42]*1.2" office:value-type="float" office:value="287.60832" calcext:value-type="float">
            <text:p>287.61</text:p>
          </table:table-cell>
          <table:table-cell table:number-columns-repeated="16377"/>
        </table:table-row>
        <table:table-row table:style-name="ro1">
          <table:table-cell table:style-name="ce337" office:value-type="string" calcext:value-type="string">
            <text:p>Servicios de matenimiento y reparaciones</text:p>
          </table:table-cell>
          <table:table-cell table:style-name="ce372" table:formula="of:=[.C25]" office:value-type="float" office:value="50" calcext:value-type="float">
            <text:p>50.00</text:p>
          </table:table-cell>
          <table:table-cell table:style-name="ce372" table:number-columns-repeated="5"/>
          <table:table-cell table:number-columns-repeated="16377"/>
        </table:table-row>
        <table:table-row table:style-name="ro1">
          <table:table-cell table:style-name="ce337" office:value-type="string" calcext:value-type="string">
            <text:p>Servicios basicos</text:p>
          </table:table-cell>
          <table:table-cell table:style-name="ce372" table:formula="of:=[.C26]" office:value-type="float" office:value="52" calcext:value-type="float">
            <text:p>52.00</text:p>
          </table:table-cell>
          <table:table-cell table:style-name="ce372" table:number-columns-repeated="5"/>
          <table:table-cell table:number-columns-repeated="16377"/>
        </table:table-row>
        <table:table-row table:style-name="ro1">
          <table:table-cell table:style-name="ce337" office:value-type="string" calcext:value-type="string">
            <text:p>Utiles de oficina y limpieza</text:p>
          </table:table-cell>
          <table:table-cell table:style-name="ce372" table:formula="of:=[.C27]" office:value-type="float" office:value="60" calcext:value-type="float">
            <text:p>60.00</text:p>
          </table:table-cell>
          <table:table-cell table:style-name="ce372" table:number-columns-repeated="5"/>
          <table:table-cell table:number-columns-repeated="16377"/>
        </table:table-row>
        <table:table-row table:style-name="ro1">
          <table:table-cell table:style-name="ce347" office:value-type="string" calcext:value-type="string">
            <text:p>TOTAL CAPITAL DE TRABAJO</text:p>
          </table:table-cell>
          <table:table-cell table:style-name="ce371" table:formula="of:=[.B32]+[.B35]+[.B40]" office:value-type="float" office:value="4173.44538552312" calcext:value-type="float">
            <text:p>4173.45</text:p>
          </table:table-cell>
          <table:table-cell table:style-name="ce371" table:formula="of:=[.C32]+[.C35]+[.C40]" office:value-type="float" office:value="817.086613949785" calcext:value-type="float">
            <text:p>817.09</text:p>
          </table:table-cell>
          <table:table-cell table:style-name="ce371" table:formula="of:=[.D32]+[.D35]+[.D40]" office:value-type="float" office:value="980.503936739741" calcext:value-type="float">
            <text:p>980.50</text:p>
          </table:table-cell>
          <table:table-cell table:style-name="ce371" table:formula="of:=[.E32]+[.E35]+[.E40]" office:value-type="float" office:value="1176.60472408769" calcext:value-type="float">
            <text:p>1176.60</text:p>
          </table:table-cell>
          <table:table-cell table:style-name="ce371" table:formula="of:=[.F32]+[.F35]+[.F40]" office:value-type="float" office:value="1411.92566890523" calcext:value-type="float">
            <text:p>1411.93</text:p>
          </table:table-cell>
          <table:table-cell table:style-name="ce371" table:formula="of:=[.G32]+[.G35]+[.G40]" office:value-type="float" office:value="1694.31080268627" calcext:value-type="float">
            <text:p>1694.31</text:p>
          </table:table-cell>
          <table:table-cell table:number-columns-repeated="16377"/>
        </table:table-row>
        <table:table-row table:style-name="ro1">
          <table:table-cell table:style-name="ce339" table:number-columns-repeated="6"/>
          <table:table-cell table:number-columns-repeated="16378"/>
        </table:table-row>
        <table:table-row table:style-name="ro13">
          <table:table-cell table:style-name="ce366" office:value-type="string" calcext:value-type="string" table:number-columns-spanned="7" table:number-rows-spanned="1">
            <text:p>SE ESTA CONSIDERANDO UN INCREMENTO EN EL 20 % DE LA PRODUCCION DURANTE LOS 05 <text:s/>PRIMEROS AÑOS</text:p>
          </table:table-cell>
          <table:covered-table-cell table:number-columns-repeated="5" table:style-name="ce375"/>
          <table:covered-table-cell table:style-name="ce387"/>
          <table:table-cell table:number-columns-repeated="16377"/>
        </table:table-row>
        <table:table-row table:style-name="ro34">
          <table:table-cell table:number-columns-repeated="16384"/>
        </table:table-row>
        <table:table-row table:style-name="ro1" table:number-rows-repeated="6">
          <table:table-cell table:style-name="ce339" table:number-columns-repeated="6"/>
          <table:table-cell table:number-columns-repeated="16378"/>
        </table:table-row>
        <table:table-row table:style-name="ro1" table:number-rows-repeated="1048520">
          <table:table-cell table:number-columns-repeated="16384"/>
        </table:table-row>
        <table:table-row table:style-name="ro1">
          <table:table-cell table:number-columns-repeated="16384"/>
        </table:table-row>
        <table:named-expressions>
          <table:named-range table:name="_xlnm.Print_Area" table:base-cell-address="$POBLACION.$A$1" table:cell-range-address="$'CAP TRABAJ'.$A$1:.$G$46" table:range-usable-as="print-range"/>
        </table:named-expressions>
      </table:table>
      <table:table table:name="INVERSION" table:style-name="ta11" table:print-ranges="INVERSION.E4:INVERSION.F16">
        <office:forms form:automatic-focus="false" form:apply-design-mode="false"/>
        <table:table-column table:style-name="co64" table:default-cell-style-name="ce336"/>
        <table:table-column table:style-name="co65" table:number-columns-repeated="2" table:default-cell-style-name="ce398"/>
        <table:table-column table:style-name="co66" table:default-cell-style-name="ce398"/>
        <table:table-column table:style-name="co67" table:default-cell-style-name="ce336"/>
        <table:table-column table:style-name="co68" table:default-cell-style-name="ce336"/>
        <table:table-column table:style-name="co69" table:default-cell-style-name="ce336"/>
        <table:table-column table:style-name="co70" table:default-cell-style-name="ce287"/>
        <table:table-column table:style-name="co71" table:default-cell-style-name="ce287"/>
        <table:table-column table:style-name="co72" table:default-cell-style-name="ce287"/>
        <table:table-column table:style-name="co73" table:default-cell-style-name="ce287"/>
        <table:table-column table:style-name="co74" table:default-cell-style-name="ce287"/>
        <table:table-column table:style-name="co58" table:default-cell-style-name="ce304"/>
        <table:table-column table:style-name="co75" table:default-cell-style-name="ce287"/>
        <table:table-column table:style-name="co28" table:default-cell-style-name="ce336"/>
        <table:table-column table:style-name="co75" table:default-cell-style-name="ce336"/>
        <table:table-column table:style-name="co1" table:number-columns-repeated="16368" table:default-cell-style-name="ce336"/>
        <table:table-row table:style-name="ro1">
          <table:table-cell table:number-columns-repeated="7"/>
          <table:table-cell table:style-name="ce429" table:formula="of:=+[.A4]" office:value-type="string" office:string-value="CONCEPTO" calcext:value-type="string" table:number-columns-spanned="1" table:number-rows-spanned="5">
            <text:p>CONCEPTO</text:p>
          </table:table-cell>
          <table:table-cell table:style-name="ce437" office:value-type="string" calcext:value-type="string" table:number-columns-spanned="1" table:number-rows-spanned="5">
            <text:p>UND. MED.</text:p>
          </table:table-cell>
          <table:table-cell table:style-name="ce437" office:value-type="string" calcext:value-type="string" table:number-columns-spanned="1" table:number-rows-spanned="5">
            <text:p>CANT.</text:p>
          </table:table-cell>
          <table:table-cell table:style-name="ce429" office:value-type="string" calcext:value-type="string" table:number-columns-spanned="5" table:number-rows-spanned="1">
            <text:p>PRESUPUESTO TECNICO</text:p>
          </table:table-cell>
          <table:covered-table-cell table:number-columns-repeated="4" table:style-name="ce429"/>
          <table:table-cell table:number-columns-repeated="16369"/>
        </table:table-row>
        <table:table-row table:style-name="ro1">
          <table:table-cell table:number-columns-repeated="7"/>
          <table:covered-table-cell table:style-name="ce429"/>
          <table:covered-table-cell table:number-columns-repeated="2" table:style-name="ce437"/>
          <table:table-cell table:style-name="ce429" office:value-type="string" calcext:value-type="string" table:number-columns-spanned="5" table:number-rows-spanned="1">
            <text:p>(Considerado en la Propuesta Productiva)</text:p>
          </table:table-cell>
          <table:covered-table-cell table:number-columns-repeated="4" table:style-name="ce429"/>
          <table:table-cell table:number-columns-repeated="16369"/>
        </table:table-row>
        <table:table-row table:style-name="ro1">
          <table:table-cell table:style-name="ce388" office:value-type="string" calcext:value-type="string" table:number-columns-spanned="4" table:number-rows-spanned="1">
            <text:p>CUADRO DE PRESUPUESTO</text:p>
          </table:table-cell>
          <table:covered-table-cell table:number-columns-repeated="3" table:style-name="ce388"/>
          <table:table-cell table:number-columns-repeated="3"/>
          <table:covered-table-cell table:style-name="ce429"/>
          <table:covered-table-cell table:number-columns-repeated="2" table:style-name="ce437"/>
          <table:table-cell table:style-name="ce429" table:formula="of:=+[.B4]" office:value-type="string" office:string-value=" TOTAL" calcext:value-type="string" table:number-columns-spanned="1" table:number-rows-spanned="3">
            <text:p><text:s/>TOTAL</text:p>
          </table:table-cell>
          <table:table-cell table:style-name="ce456" office:value-type="string" calcext:value-type="string" table:number-columns-spanned="1" table:number-rows-spanned="3">
            <text:p>Monto financiado por el GR</text:p>
          </table:table-cell>
          <table:table-cell table:style-name="ce458" office:value-type="string" calcext:value-type="string" table:number-columns-spanned="3" table:number-rows-spanned="1">
            <text:p>Monto financiado por los AEO</text:p>
          </table:table-cell>
          <table:covered-table-cell table:style-name="ce467"/>
          <table:covered-table-cell table:style-name="ce469"/>
          <table:table-cell table:number-columns-repeated="16369"/>
        </table:table-row>
        <table:table-row table:style-name="ro14">
          <table:table-cell table:style-name="ce389" office:value-type="string" calcext:value-type="string" table:number-columns-spanned="1" table:number-rows-spanned="2">
            <text:p>CONCEPTO</text:p>
          </table:table-cell>
          <table:table-cell table:style-name="ce399" office:value-type="string" calcext:value-type="string" table:number-columns-spanned="1" table:number-rows-spanned="2">
            <text:p><text:s/>TOTAL</text:p>
          </table:table-cell>
          <table:table-cell table:style-name="ce399" office:value-type="string" calcext:value-type="string" table:number-columns-spanned="2" table:number-rows-spanned="1">
            <text:p>FINANCIAMIENTO</text:p>
          </table:table-cell>
          <table:covered-table-cell table:style-name="ce399"/>
          <table:table-cell table:style-name="ce360" office:value-type="string" calcext:value-type="string">
            <text:p><text:s text:c="31"/>ESTRUCTURA DE LA INVERSIÒN</text:p>
          </table:table-cell>
          <table:table-cell table:number-columns-repeated="2"/>
          <table:covered-table-cell table:style-name="ce429"/>
          <table:covered-table-cell table:number-columns-repeated="2" table:style-name="ce437"/>
          <table:covered-table-cell table:style-name="ce429"/>
          <table:covered-table-cell table:style-name="ce456"/>
          <table:table-cell table:style-name="ce429" office:value-type="string" calcext:value-type="string">
            <text:p>En efectivo</text:p>
          </table:table-cell>
          <table:table-cell table:style-name="ce429" office:value-type="string" calcext:value-type="string">
            <text:p>En Valorizaciones</text:p>
          </table:table-cell>
          <table:table-cell table:style-name="ce429" office:value-type="string" calcext:value-type="string">
            <text:p>En Total</text:p>
          </table:table-cell>
          <table:table-cell table:number-columns-repeated="16369"/>
        </table:table-row>
        <table:table-row table:style-name="ro1">
          <table:covered-table-cell table:style-name="ce390"/>
          <table:covered-table-cell table:style-name="ce399"/>
          <table:table-cell table:style-name="ce399" office:value-type="string" calcext:value-type="string">
            <text:p>AEO</text:p>
          </table:table-cell>
          <table:table-cell table:style-name="ce399" office:value-type="string" calcext:value-type="string">
            <text:p>PROCOMPITE</text:p>
          </table:table-cell>
          <table:table-cell table:style-name="ce310" office:value-type="string" calcext:value-type="string">
            <text:p>CONCEPTO</text:p>
          </table:table-cell>
          <table:table-cell table:style-name="ce310" office:value-type="string" calcext:value-type="string">
            <text:p><text:s/>TOTAL</text:p>
          </table:table-cell>
          <table:table-cell/>
          <table:covered-table-cell table:style-name="ce429"/>
          <table:covered-table-cell table:number-columns-repeated="2" table:style-name="ce437"/>
          <table:covered-table-cell table:style-name="ce429"/>
          <table:covered-table-cell table:style-name="ce456"/>
          <table:table-cell table:number-columns-repeated="3" table:style-name="ce458" office:value-type="string" calcext:value-type="string">
            <text:p>(s/)</text:p>
          </table:table-cell>
          <table:table-cell table:number-columns-repeated="16369"/>
        </table:table-row>
        <table:table-row table:style-name="ro1">
          <table:table-cell table:style-name="ce391" office:value-type="string" calcext:value-type="string">
            <text:p>I. INVERSION FIJA</text:p>
          </table:table-cell>
          <table:table-cell table:style-name="ce400" table:formula="of:=[.B7]+[.B61]" office:value-type="float" office:value="121326" calcext:value-type="float">
            <text:p>121326.00</text:p>
          </table:table-cell>
          <table:table-cell table:style-name="ce411" table:formula="of:=[.C7]+[.C61]" office:value-type="float" office:value="26522" calcext:value-type="float">
            <text:p>26,522.00</text:p>
          </table:table-cell>
          <table:table-cell table:style-name="ce411" table:formula="of:=[.D7]+[.D61]" office:value-type="float" office:value="94804" calcext:value-type="float">
            <text:p>94,804.00</text:p>
          </table:table-cell>
          <table:table-cell table:style-name="ce347" office:value-type="string" calcext:value-type="string">
            <text:p>I.INVERSION FIJA </text:p>
          </table:table-cell>
          <table:table-cell table:style-name="ce343" table:formula="of:=[.F7]+[.F12]" office:value-type="float" office:value="121326" calcext:value-type="float">
            <text:p><text:s/>121,326.00 </text:p>
          </table:table-cell>
          <table:table-cell/>
          <table:table-cell table:style-name="ce430" table:formula="of:=+[.A6]" office:value-type="string" office:string-value="I. INVERSION FIJA" calcext:value-type="string">
            <text:p>I. INVERSION FIJA</text:p>
          </table:table-cell>
          <table:table-cell table:style-name="ce430" table:number-columns-repeated="2"/>
          <table:table-cell table:style-name="ce444" table:formula="of:=[.K7]+[.K61]" office:value-type="float" office:value="121326" calcext:value-type="float">
            <text:p>121,326.00</text:p>
          </table:table-cell>
          <table:table-cell table:style-name="ce444" table:formula="of:=[.L7]+[.L61]" office:value-type="float" office:value="94804" calcext:value-type="float">
            <text:p>94,804.00</text:p>
          </table:table-cell>
          <table:table-cell table:style-name="ce459" table:formula="of:=[.M7]+[.M61]" office:value-type="float" office:value="5000" calcext:value-type="float">
            <text:p>5,000.00</text:p>
          </table:table-cell>
          <table:table-cell table:style-name="ce459" table:formula="of:=[.N7]+[.N61]" office:value-type="float" office:value="21522" calcext:value-type="float">
            <text:p>21,522.00</text:p>
          </table:table-cell>
          <table:table-cell table:style-name="ce459" table:formula="of:=[.O7]+[.O61]" office:value-type="float" office:value="26522" calcext:value-type="float">
            <text:p>26,522.00</text:p>
          </table:table-cell>
          <table:table-cell table:number-columns-repeated="16369"/>
        </table:table-row>
        <table:table-row table:style-name="ro1">
          <table:table-cell table:style-name="ce392" office:value-type="string" calcext:value-type="string">
            <text:p>I. 1 INVERSION FIJA TANGIBLE</text:p>
          </table:table-cell>
          <table:table-cell table:style-name="ce401" table:formula="of:=[.B8]+[.B41]+[.B55]+[.B57]" office:value-type="float" office:value="103076" calcext:value-type="float">
            <text:p>103076.00</text:p>
          </table:table-cell>
          <table:table-cell table:style-name="ce411" table:formula="of:=[.C8]+[.C41]+[.C55]+[.C57]" office:value-type="float" office:value="26522" calcext:value-type="float">
            <text:p>26,522.00</text:p>
          </table:table-cell>
          <table:table-cell table:style-name="ce411" table:formula="of:=[.D8]+[.D41]+[.D55]+[.D57]" office:value-type="float" office:value="76554" calcext:value-type="float">
            <text:p>76,554.00</text:p>
          </table:table-cell>
          <table:table-cell table:style-name="ce347" office:value-type="string" calcext:value-type="string">
            <text:p><text:s text:c="2"/>I.1. INVERSION FIJA TANGIBLE</text:p>
          </table:table-cell>
          <table:table-cell table:style-name="ce343" table:formula="of:=SUM([.F8:.F11])" office:value-type="float" office:value="103076" calcext:value-type="float">
            <text:p><text:s/>103,076.00 </text:p>
          </table:table-cell>
          <table:table-cell/>
          <table:table-cell table:style-name="ce430" table:formula="of:=+[.A7]" office:value-type="string" office:string-value="I. 1 INVERSION FIJA TANGIBLE" calcext:value-type="string">
            <text:p>I. 1 INVERSION FIJA TANGIBLE</text:p>
          </table:table-cell>
          <table:table-cell table:style-name="ce430" table:number-columns-repeated="2"/>
          <table:table-cell table:style-name="ce445" table:formula="of:=[.K8]+[.K41]+[.K55]+[.K57]" office:value-type="float" office:value="103076" calcext:value-type="float">
            <text:p>103,076.00</text:p>
          </table:table-cell>
          <table:table-cell table:style-name="ce445" table:formula="of:=[.L8]+[.L41]+[.L55]+[.L57]" office:value-type="float" office:value="76554" calcext:value-type="float">
            <text:p>76,554.00</text:p>
          </table:table-cell>
          <table:table-cell table:style-name="ce460" table:formula="of:=[.M8]+[.M41]+[.M55]+[.M57]" office:value-type="float" office:value="5000" calcext:value-type="float">
            <text:p>5,000.00</text:p>
          </table:table-cell>
          <table:table-cell table:style-name="ce460" table:formula="of:=[.N8]+[.N41]+[.N55]+[.N57]" office:value-type="float" office:value="21522" calcext:value-type="float">
            <text:p>21,522.00</text:p>
          </table:table-cell>
          <table:table-cell table:style-name="ce460" table:formula="of:=[.O8]+[.O41]+[.O55]+[.O57]" office:value-type="float" office:value="26522" calcext:value-type="float">
            <text:p>26,522.00</text:p>
          </table:table-cell>
          <table:table-cell table:number-columns-repeated="16369"/>
        </table:table-row>
        <table:table-row table:style-name="ro1">
          <table:table-cell table:style-name="ce392" office:value-type="string" calcext:value-type="string">
            <text:p>I.1.1 TERRENOS Y OBRAS CIVILES</text:p>
          </table:table-cell>
          <table:table-cell table:style-name="ce401" table:formula="of:=[.B9]+[.B11]+[.B32]" office:value-type="float" office:value="67368" calcext:value-type="float">
            <text:p>67368.00</text:p>
          </table:table-cell>
          <table:table-cell table:style-name="ce411" table:formula="of:=[.C9]+[.C11]+[.C32]" office:value-type="float" office:value="21522" calcext:value-type="float">
            <text:p>21,522.00</text:p>
          </table:table-cell>
          <table:table-cell table:style-name="ce411" table:formula="of:=[.D9]+[.D11]+[.D32]" office:value-type="float" office:value="45846" calcext:value-type="float">
            <text:p>45,846.00</text:p>
          </table:table-cell>
          <table:table-cell table:style-name="ce337" office:value-type="string" calcext:value-type="string">
            <text:p><text:s text:c="5"/>I.1.1. TERRENOS Y OBRAS CIVILES</text:p>
          </table:table-cell>
          <table:table-cell table:style-name="ce342" table:formula="of:=+[.B8]" office:value-type="float" office:value="67368" calcext:value-type="float">
            <text:p><text:s/>67,368.00 </text:p>
          </table:table-cell>
          <table:table-cell table:style-name="ce428"/>
          <table:table-cell table:style-name="ce430" table:formula="of:=+[.A8]" office:value-type="string" office:string-value="I.1.1 TERRENOS Y OBRAS CIVILES" calcext:value-type="string">
            <text:p>I.1.1 TERRENOS Y OBRAS CIVILES</text:p>
          </table:table-cell>
          <table:table-cell table:style-name="ce430" table:number-columns-repeated="2"/>
          <table:table-cell table:style-name="ce445" table:formula="of:=[.K9]+[.K11]+[.K32]" office:value-type="float" office:value="67368" calcext:value-type="float">
            <text:p>67,368.00</text:p>
          </table:table-cell>
          <table:table-cell table:style-name="ce445" table:formula="of:=[.L9]+[.L11]+[.L32]" office:value-type="float" office:value="45846" calcext:value-type="float">
            <text:p>45,846.00</text:p>
          </table:table-cell>
          <table:table-cell table:style-name="ce460" table:formula="of:=[.M9]+[.M11]+[.M32]" office:value-type="float" office:value="0" calcext:value-type="float">
            <text:p>0.00</text:p>
          </table:table-cell>
          <table:table-cell table:style-name="ce460" table:formula="of:=[.N9]+[.N11]+[.N32]" office:value-type="float" office:value="21522" calcext:value-type="float">
            <text:p>21,522.00</text:p>
          </table:table-cell>
          <table:table-cell table:style-name="ce460" table:formula="of:=[.O9]+[.O11]+[.O32]" office:value-type="float" office:value="21522" calcext:value-type="float">
            <text:p>21,522.00</text:p>
          </table:table-cell>
          <table:table-cell table:style-name="ce428" table:number-columns-repeated="16369"/>
        </table:table-row>
        <table:table-row table:style-name="ro1">
          <table:table-cell table:style-name="ce393" table:formula="of:=+[$'TERREN Y OBR CIV'.B5]" office:value-type="string" office:string-value="I. TERRENOS" calcext:value-type="string">
            <text:p>I. TERRENOS</text:p>
          </table:table-cell>
          <table:table-cell table:style-name="ce402" table:formula="of:=[.B10]" office:value-type="float" office:value="0" calcext:value-type="float">
            <text:p>0.00</text:p>
          </table:table-cell>
          <table:table-cell table:style-name="ce412" table:formula="of:=[.C10]" office:value-type="float" office:value="0" calcext:value-type="float">
            <text:p>0.00</text:p>
          </table:table-cell>
          <table:table-cell table:style-name="ce412" table:formula="of:=[.D10]" office:value-type="float" office:value="0" calcext:value-type="float">
            <text:p>0.00</text:p>
          </table:table-cell>
          <table:table-cell table:style-name="ce337" office:value-type="string" calcext:value-type="string">
            <text:p><text:s text:c="5"/>I.1.2. MAQUINARIA Y EQUIPO</text:p>
          </table:table-cell>
          <table:table-cell table:style-name="ce342" table:formula="of:=+[.B41]" office:value-type="float" office:value="30408" calcext:value-type="float">
            <text:p><text:s/>30,408.00 </text:p>
          </table:table-cell>
          <table:table-cell/>
          <table:table-cell table:style-name="ce431" table:formula="of:=+[$'TERREN Y OBR CIV'.B5]" office:value-type="string" office:string-value="I. TERRENOS" calcext:value-type="string">
            <text:p>I. TERRENOS</text:p>
          </table:table-cell>
          <table:table-cell table:style-name="ce431" table:number-columns-repeated="2"/>
          <table:table-cell table:style-name="ce446" table:formula="of:=[.K10]" office:value-type="float" office:value="0" calcext:value-type="float">
            <text:p>0.00</text:p>
          </table:table-cell>
          <table:table-cell table:style-name="ce446" table:formula="of:=[.L10]" office:value-type="float" office:value="0" calcext:value-type="float">
            <text:p>0.00</text:p>
          </table:table-cell>
          <table:table-cell table:style-name="ce461" table:formula="of:=[.K10]" office:value-type="float" office:value="0" calcext:value-type="float">
            <text:p>0.00</text:p>
          </table:table-cell>
          <table:table-cell table:style-name="ce461" table:formula="of:=[.L10]" office:value-type="float" office:value="0" calcext:value-type="float">
            <text:p>0.00</text:p>
          </table:table-cell>
          <table:table-cell table:style-name="ce461" table:formula="of:=[.M10]" office:value-type="float" office:value="0" calcext:value-type="float">
            <text:p>0.00</text:p>
          </table:table-cell>
          <table:table-cell table:number-columns-repeated="16369"/>
        </table:table-row>
        <table:table-row table:style-name="ro1">
          <table:table-cell table:style-name="ce394" office:value-type="string" calcext:value-type="string">
            <text:p>Terrenos</text:p>
          </table:table-cell>
          <table:table-cell table:style-name="ce403" table:formula="of:=+[$'TERREN Y OBR CIV'.F5]" office:value-type="float" office:value="0" calcext:value-type="float">
            <text:p>0.00</text:p>
          </table:table-cell>
          <table:table-cell table:style-name="ce413" table:formula="of:=[.B10]" office:value-type="float" office:value="0" calcext:value-type="float">
            <text:p>0.00</text:p>
          </table:table-cell>
          <table:table-cell table:style-name="ce413"/>
          <table:table-cell table:style-name="ce337" office:value-type="string" calcext:value-type="string">
            <text:p><text:s text:c="5"/>I.1.3. VEHICULOS</text:p>
          </table:table-cell>
          <table:table-cell table:style-name="ce342" table:formula="of:=[$'MUEB, MAQ,EQUIP'.F28]" office:value-type="float" office:value="0" calcext:value-type="float">
            <text:p><text:s/>- <text:s text:c="2"/></text:p>
          </table:table-cell>
          <table:table-cell/>
          <table:table-cell table:style-name="ce432" table:formula="of:=+[.A10]" office:value-type="string" office:string-value="Terrenos" calcext:value-type="string">
            <text:p>Terrenos</text:p>
          </table:table-cell>
          <table:table-cell table:style-name="ce432" table:number-columns-repeated="2"/>
          <table:table-cell table:style-name="ce447" table:formula="of:=+[.B10]" office:value-type="float" office:value="0" calcext:value-type="float">
            <text:p>0.00</text:p>
          </table:table-cell>
          <table:table-cell table:style-name="ce450"/>
          <table:table-cell table:style-name="ce462" table:formula="of:=[.K10]" office:value-type="float" office:value="0" calcext:value-type="float">
            <text:p>0.00</text:p>
          </table:table-cell>
          <table:table-cell table:style-name="ce468"/>
          <table:table-cell table:style-name="ce470"/>
          <table:table-cell table:number-columns-repeated="16369"/>
        </table:table-row>
        <table:table-row table:style-name="ro1">
          <table:table-cell table:style-name="ce393" table:formula="of:=+[$'TERREN Y OBR CIV'.B6]" office:value-type="string" office:string-value="II. MEJORAMIENTO DE INFRAESTRUCTURA  GALPONES" calcext:value-type="string">
            <text:p>II. MEJORAMIENTO DE INFRAESTRUCTURA <text:s/>GALPONES</text:p>
          </table:table-cell>
          <table:table-cell table:style-name="ce404" table:formula="of:=SUM([.B12:.B31])" office:value-type="float" office:value="43886" calcext:value-type="float">
            <text:p>43886.00</text:p>
          </table:table-cell>
          <table:table-cell table:style-name="ce414" table:formula="of:=SUM([.C12:.C30])" office:value-type="float" office:value="19062" calcext:value-type="float">
            <text:p>19,062.00</text:p>
          </table:table-cell>
          <table:table-cell table:style-name="ce414" table:formula="of:=SUM([.D12:.D31])" office:value-type="float" office:value="24824" calcext:value-type="float">
            <text:p>24,824.00</text:p>
          </table:table-cell>
          <table:table-cell table:style-name="ce337" office:value-type="string" calcext:value-type="string">
            <text:p><text:s text:c="5"/>I.1.4. MUEBLES Y ENSERES</text:p>
          </table:table-cell>
          <table:table-cell table:style-name="ce342" table:formula="of:=+[.B57]" office:value-type="float" office:value="5300" calcext:value-type="float">
            <text:p><text:s/>5,300.00 </text:p>
          </table:table-cell>
          <table:table-cell/>
          <table:table-cell table:style-name="ce431" table:formula="of:=+[$'TERREN Y OBR CIV'.B6]" office:value-type="string" office:string-value="II. MEJORAMIENTO DE INFRAESTRUCTURA  GALPONES" calcext:value-type="string">
            <text:p>II. MEJORAMIENTO DE INFRAESTRUCTURA <text:s/>GALPONES</text:p>
          </table:table-cell>
          <table:table-cell table:style-name="ce431" table:number-columns-repeated="2"/>
          <table:table-cell table:style-name="ce448" table:formula="of:=SUM([.K12:.K31])" office:value-type="float" office:value="43886" calcext:value-type="float">
            <text:p>43,886.00</text:p>
          </table:table-cell>
          <table:table-cell table:style-name="ce448" table:formula="of:=SUM([.L12:.L31])" office:value-type="float" office:value="24824" calcext:value-type="float">
            <text:p>24,824.00</text:p>
          </table:table-cell>
          <table:table-cell table:style-name="ce463" table:formula="of:=SUM([.M12:.M30])" office:value-type="float" office:value="0" calcext:value-type="float">
            <text:p>0.00</text:p>
          </table:table-cell>
          <table:table-cell table:style-name="ce463" table:formula="of:=SUM([.N12:.N30])" office:value-type="float" office:value="19062" calcext:value-type="float">
            <text:p>19,062.00</text:p>
          </table:table-cell>
          <table:table-cell table:style-name="ce463" table:formula="of:=SUM([.O12:.O30])" office:value-type="float" office:value="19062" calcext:value-type="float">
            <text:p>19,062.00</text:p>
          </table:table-cell>
          <table:table-cell table:number-columns-repeated="16369"/>
        </table:table-row>
        <table:table-row table:style-name="ro1">
          <table:table-cell table:style-name="ce394" table:formula="of:=+[$'TERREN Y OBR CIV'.B7]" office:value-type="string" office:string-value="Clavos para madera c/c 3&quot;" calcext:value-type="string">
            <text:p>Clavos para madera c/c 3"</text:p>
          </table:table-cell>
          <table:table-cell table:style-name="ce403" table:formula="of:=+[$'TERREN Y OBR CIV'.F7]" office:value-type="float" office:value="80" calcext:value-type="float">
            <text:p>80.00</text:p>
          </table:table-cell>
          <table:table-cell table:style-name="ce413"/>
          <table:table-cell table:style-name="ce413" table:formula="of:=+[.B12]" office:value-type="float" office:value="80" calcext:value-type="float">
            <text:p>80.00</text:p>
          </table:table-cell>
          <table:table-cell table:style-name="ce347" office:value-type="string" calcext:value-type="string">
            <text:p><text:s text:c="2"/>I.2. INVERSION FIJA INTANGIBLE</text:p>
          </table:table-cell>
          <table:table-cell table:style-name="ce343" table:formula="of:=+[.B61]" office:value-type="float" office:value="18250" calcext:value-type="float">
            <text:p><text:s/>18,250.00 </text:p>
          </table:table-cell>
          <table:table-cell/>
          <table:table-cell table:style-name="ce432" table:formula="of:=+[$'TERREN Y OBR CIV'.B7]" office:value-type="string" office:string-value="Clavos para madera c/c 3&quot;" calcext:value-type="string">
            <text:p>Clavos para madera c/c 3"</text:p>
          </table:table-cell>
          <table:table-cell table:style-name="ce438" table:formula="of:=+[$'TERREN Y OBR CIV'.C7]" office:value-type="string" office:string-value="kg" calcext:value-type="string">
            <text:p>kg</text:p>
          </table:table-cell>
          <table:table-cell table:style-name="ce438" table:formula="of:=+[$'TERREN Y OBR CIV'.D7]" office:value-type="float" office:value="16" calcext:value-type="float">
            <text:p>16</text:p>
          </table:table-cell>
          <table:table-cell table:style-name="ce447" table:formula="of:=+[.B12]" office:value-type="float" office:value="80" calcext:value-type="float">
            <text:p>80.00</text:p>
          </table:table-cell>
          <table:table-cell table:style-name="ce450" table:formula="of:=+[.K12]" office:value-type="float" office:value="80" calcext:value-type="float">
            <text:p>80.00</text:p>
          </table:table-cell>
          <table:table-cell table:style-name="ce464"/>
          <table:table-cell table:style-name="ce462"/>
          <table:table-cell table:style-name="ce462" table:formula="of:=IF(SUM([.M12:.N12])&gt;0;SUM([.M12:.N12]);&quot;&quot;)">
            <text:p/>
          </table:table-cell>
          <table:table-cell table:number-columns-repeated="16369"/>
        </table:table-row>
        <table:table-row table:style-name="ro1">
          <table:table-cell table:style-name="ce394" table:formula="of:=+[$'TERREN Y OBR CIV'.B8]" office:value-type="string" office:string-value="Clavos para madera c/c 4&quot;" calcext:value-type="string">
            <text:p>Clavos para madera c/c 4"</text:p>
          </table:table-cell>
          <table:table-cell table:style-name="ce403" table:formula="of:=+[$'TERREN Y OBR CIV'.F8]" office:value-type="float" office:value="80" calcext:value-type="float">
            <text:p>80.00</text:p>
          </table:table-cell>
          <table:table-cell table:style-name="ce413"/>
          <table:table-cell table:style-name="ce413" table:formula="of:=+[.B13]" office:value-type="float" office:value="80" calcext:value-type="float">
            <text:p>80.00</text:p>
          </table:table-cell>
          <table:table-cell table:style-name="ce347" office:value-type="string" calcext:value-type="string">
            <text:p>II. CAPITAL DE TRABAJO</text:p>
          </table:table-cell>
          <table:table-cell table:style-name="ce343" table:formula="of:=[$'CAP TRABAJ'.C28]" office:value-type="float" office:value="4173.44538552312" calcext:value-type="float">
            <text:p><text:s/>4,173.45 </text:p>
          </table:table-cell>
          <table:table-cell/>
          <table:table-cell table:style-name="ce432" table:formula="of:=+[$'TERREN Y OBR CIV'.B8]" office:value-type="string" office:string-value="Clavos para madera c/c 4&quot;" calcext:value-type="string">
            <text:p>Clavos para madera c/c 4"</text:p>
          </table:table-cell>
          <table:table-cell table:style-name="ce438" table:formula="of:=+[$'TERREN Y OBR CIV'.C8]" office:value-type="string" office:string-value="kg" calcext:value-type="string">
            <text:p>kg</text:p>
          </table:table-cell>
          <table:table-cell table:style-name="ce438" table:formula="of:=+[$'TERREN Y OBR CIV'.D8]" office:value-type="float" office:value="16" calcext:value-type="float">
            <text:p>16</text:p>
          </table:table-cell>
          <table:table-cell table:style-name="ce447" table:formula="of:=+[.B13]" office:value-type="float" office:value="80" calcext:value-type="float">
            <text:p>80.00</text:p>
          </table:table-cell>
          <table:table-cell table:style-name="ce450" table:formula="of:=+[.K13]" office:value-type="float" office:value="80" calcext:value-type="float">
            <text:p>80.00</text:p>
          </table:table-cell>
          <table:table-cell table:style-name="ce464"/>
          <table:table-cell table:style-name="ce462"/>
          <table:table-cell table:style-name="ce462" table:formula="of:=IF(SUM([.M13:.N13])&gt;0;SUM([.M13:.N13]);&quot;&quot;)">
            <text:p/>
          </table:table-cell>
          <table:table-cell table:number-columns-repeated="16369"/>
        </table:table-row>
        <table:table-row table:style-name="ro1">
          <table:table-cell table:style-name="ce394" table:formula="of:=+[$'TERREN Y OBR CIV'.B9]" office:value-type="string" office:string-value="Clavos para calamina" calcext:value-type="string">
            <text:p>Clavos para calamina</text:p>
          </table:table-cell>
          <table:table-cell table:style-name="ce403" table:formula="of:=+[$'TERREN Y OBR CIV'.F9]" office:value-type="float" office:value="216" calcext:value-type="float">
            <text:p>216.00</text:p>
          </table:table-cell>
          <table:table-cell table:style-name="ce413"/>
          <table:table-cell table:style-name="ce413" table:formula="of:=+[.B14]" office:value-type="float" office:value="216" calcext:value-type="float">
            <text:p>216.00</text:p>
          </table:table-cell>
          <table:table-cell table:style-name="ce347" office:value-type="string" calcext:value-type="string">
            <text:p>III. GASTOS GENERALES ( 8.0 % )IF</text:p>
          </table:table-cell>
          <table:table-cell table:style-name="ce343" table:formula="of:=+[.B66]" office:value-type="float" office:value="9706.08" calcext:value-type="float">
            <text:p><text:s/>9,706.08 </text:p>
          </table:table-cell>
          <table:table-cell/>
          <table:table-cell table:style-name="ce432" table:formula="of:=+[$'TERREN Y OBR CIV'.B9]" office:value-type="string" office:string-value="Clavos para calamina" calcext:value-type="string">
            <text:p>Clavos para calamina</text:p>
          </table:table-cell>
          <table:table-cell table:style-name="ce438" table:formula="of:=+[$'TERREN Y OBR CIV'.C9]" office:value-type="string" office:string-value="kg" calcext:value-type="string">
            <text:p>kg</text:p>
          </table:table-cell>
          <table:table-cell table:style-name="ce438" table:formula="of:=+[$'TERREN Y OBR CIV'.D9]" office:value-type="float" office:value="24" calcext:value-type="float">
            <text:p>24</text:p>
          </table:table-cell>
          <table:table-cell table:style-name="ce447" table:formula="of:=+[.B14]" office:value-type="float" office:value="216" calcext:value-type="float">
            <text:p>216.00</text:p>
          </table:table-cell>
          <table:table-cell table:style-name="ce450" table:formula="of:=+[.K14]" office:value-type="float" office:value="216" calcext:value-type="float">
            <text:p>216.00</text:p>
          </table:table-cell>
          <table:table-cell table:style-name="ce464"/>
          <table:table-cell table:style-name="ce462"/>
          <table:table-cell table:style-name="ce462" table:formula="of:=IF(SUM([.M14:.N14])&gt;0;SUM([.M14:.N14]);&quot;&quot;)">
            <text:p/>
          </table:table-cell>
          <table:table-cell table:number-columns-repeated="16369"/>
        </table:table-row>
        <table:table-row table:style-name="ro1">
          <table:table-cell table:style-name="ce394" table:formula="of:=+[$'TERREN Y OBR CIV'.B10]" office:value-type="string" office:string-value="Adobe 0.40x0.25x0.18m" calcext:value-type="string">
            <text:p>Adobe 0.40x0.25x0.18m</text:p>
          </table:table-cell>
          <table:table-cell table:style-name="ce403" table:formula="of:=+[$'TERREN Y OBR CIV'.F10]" office:value-type="float" office:value="12000" calcext:value-type="float">
            <text:p>12000.00</text:p>
          </table:table-cell>
          <table:table-cell table:style-name="ce413" table:formula="of:=+[.B15]" office:value-type="float" office:value="12000" calcext:value-type="float">
            <text:p>12,000.00</text:p>
          </table:table-cell>
          <table:table-cell table:style-name="ce413"/>
          <table:table-cell table:style-name="ce347" office:value-type="string" calcext:value-type="string">
            <text:p>IV. GASTOS DE SUPERVISION (4.%) IF</text:p>
          </table:table-cell>
          <table:table-cell table:style-name="ce343" table:formula="of:=+[.B67]" office:value-type="float" office:value="4853.04" calcext:value-type="float">
            <text:p><text:s/>4,853.04 </text:p>
          </table:table-cell>
          <table:table-cell/>
          <table:table-cell table:style-name="ce432" table:formula="of:=+[$'TERREN Y OBR CIV'.B10]" office:value-type="string" office:string-value="Adobe 0.40x0.25x0.18m" calcext:value-type="string">
            <text:p>Adobe 0.40x0.25x0.18m</text:p>
          </table:table-cell>
          <table:table-cell table:style-name="ce438" table:formula="of:=+[$'TERREN Y OBR CIV'.C10]" office:value-type="string" office:string-value="und" calcext:value-type="string">
            <text:p>und</text:p>
          </table:table-cell>
          <table:table-cell table:style-name="ce438" table:formula="of:=+[$'TERREN Y OBR CIV'.D10]" office:value-type="float" office:value="12000" calcext:value-type="float">
            <text:p>12000</text:p>
          </table:table-cell>
          <table:table-cell table:style-name="ce447" table:formula="of:=+[.B15]" office:value-type="float" office:value="12000" calcext:value-type="float">
            <text:p>12,000.00</text:p>
          </table:table-cell>
          <table:table-cell table:style-name="ce450"/>
          <table:table-cell table:style-name="ce464"/>
          <table:table-cell table:style-name="ce462" table:formula="of:=+[.K15]" office:value-type="float" office:value="12000" calcext:value-type="float">
            <text:p>12,000.00</text:p>
          </table:table-cell>
          <table:table-cell table:style-name="ce462" table:formula="of:=IF(SUM([.M15:.N15])&gt;0;SUM([.M15:.N15]);&quot;&quot;)" office:value-type="float" office:value="12000" calcext:value-type="float">
            <text:p>12,000.00</text:p>
          </table:table-cell>
          <table:table-cell table:number-columns-repeated="16369"/>
        </table:table-row>
        <table:table-row table:style-name="ro1">
          <table:table-cell table:style-name="ce394" table:formula="of:=+[$'TERREN Y OBR CIV'.B11]" office:value-type="string" office:string-value="Vigas Dintel 4&quot;x4&quot;x2.0 m" calcext:value-type="string">
            <text:p>Vigas Dintel 4"x4"x2.0 m</text:p>
          </table:table-cell>
          <table:table-cell table:style-name="ce403" table:formula="of:=+[$'TERREN Y OBR CIV'.F11]" office:value-type="float" office:value="1440" calcext:value-type="float">
            <text:p>1440.00</text:p>
          </table:table-cell>
          <table:table-cell table:style-name="ce413"/>
          <table:table-cell table:style-name="ce413" table:formula="of:=+[.B16]" office:value-type="float" office:value="1440" calcext:value-type="float">
            <text:p>1,440.00</text:p>
          </table:table-cell>
          <table:table-cell table:style-name="ce347" office:value-type="string" calcext:value-type="string">
            <text:p>TOTAL INVERSIÒN</text:p>
          </table:table-cell>
          <table:table-cell table:style-name="ce343" table:formula="of:=[.F14]+[.F13]+[.F6]+[.F15]" office:value-type="float" office:value="140058.565385523" calcext:value-type="float">
            <text:p><text:s/>140,058.57 </text:p>
          </table:table-cell>
          <table:table-cell/>
          <table:table-cell table:style-name="ce432" table:formula="of:=+[$'TERREN Y OBR CIV'.B11]" office:value-type="string" office:string-value="Vigas Dintel 4&quot;x4&quot;x2.0 m" calcext:value-type="string">
            <text:p>Vigas Dintel 4"x4"x2.0 m</text:p>
          </table:table-cell>
          <table:table-cell table:style-name="ce438" table:formula="of:=+[$'TERREN Y OBR CIV'.C11]" office:value-type="string" office:string-value="und" calcext:value-type="string">
            <text:p>und</text:p>
          </table:table-cell>
          <table:table-cell table:style-name="ce438" table:formula="of:=+[$'TERREN Y OBR CIV'.D11]" office:value-type="float" office:value="80" calcext:value-type="float">
            <text:p>80</text:p>
          </table:table-cell>
          <table:table-cell table:style-name="ce447" table:formula="of:=+[.B16]" office:value-type="float" office:value="1440" calcext:value-type="float">
            <text:p>1,440.00</text:p>
          </table:table-cell>
          <table:table-cell table:style-name="ce450" table:formula="of:=+[.K16]" office:value-type="float" office:value="1440" calcext:value-type="float">
            <text:p>1,440.00</text:p>
          </table:table-cell>
          <table:table-cell table:style-name="ce464"/>
          <table:table-cell table:style-name="ce462"/>
          <table:table-cell table:style-name="ce462" table:formula="of:=IF(SUM([.M16:.N16])&gt;0;SUM([.M16:.N16]);&quot;&quot;)">
            <text:p/>
          </table:table-cell>
          <table:table-cell table:number-columns-repeated="16369"/>
        </table:table-row>
        <table:table-row table:style-name="ro1">
          <table:table-cell table:style-name="ce394" table:formula="of:=+[$'TERREN Y OBR CIV'.B12]" office:value-type="string" office:string-value="Vigas 3&quot;x3&quot;x3.5 m" calcext:value-type="string">
            <text:p>Vigas 3"x3"x3.5 m</text:p>
          </table:table-cell>
          <table:table-cell table:style-name="ce403" table:formula="of:=+[$'TERREN Y OBR CIV'.F12]" office:value-type="float" office:value="2400" calcext:value-type="float">
            <text:p>2400.00</text:p>
          </table:table-cell>
          <table:table-cell table:style-name="ce413"/>
          <table:table-cell table:style-name="ce413" table:formula="of:=+[.B17]" office:value-type="float" office:value="2400" calcext:value-type="float">
            <text:p>2,400.00</text:p>
          </table:table-cell>
          <table:table-cell/>
          <table:table-cell table:style-name="ce424" table:formula="of:=+[.B68]" office:value-type="float" office:value="140058.565385523" calcext:value-type="float">
            <text:p>140,058.57</text:p>
          </table:table-cell>
          <table:table-cell/>
          <table:table-cell table:style-name="ce432" table:formula="of:=+[$'TERREN Y OBR CIV'.B12]" office:value-type="string" office:string-value="Vigas 3&quot;x3&quot;x3.5 m" calcext:value-type="string">
            <text:p>Vigas 3"x3"x3.5 m</text:p>
          </table:table-cell>
          <table:table-cell table:style-name="ce438" table:formula="of:=+[$'TERREN Y OBR CIV'.C12]" office:value-type="string" office:string-value="und" calcext:value-type="string">
            <text:p>und</text:p>
          </table:table-cell>
          <table:table-cell table:style-name="ce438" table:formula="of:=+[$'TERREN Y OBR CIV'.D12]" office:value-type="float" office:value="160" calcext:value-type="float">
            <text:p>160</text:p>
          </table:table-cell>
          <table:table-cell table:style-name="ce447" table:formula="of:=+[.B17]" office:value-type="float" office:value="2400" calcext:value-type="float">
            <text:p>2,400.00</text:p>
          </table:table-cell>
          <table:table-cell table:style-name="ce450" table:formula="of:=[.K17]" office:value-type="float" office:value="2400" calcext:value-type="float">
            <text:p>2,400.00</text:p>
          </table:table-cell>
          <table:table-cell table:style-name="ce464"/>
          <table:table-cell table:style-name="ce462"/>
          <table:table-cell table:style-name="ce462" table:formula="of:=IF(SUM([.M17:.N17])&gt;0;SUM([.M17:.N17]);&quot;&quot;)">
            <text:p/>
          </table:table-cell>
          <table:table-cell table:number-columns-repeated="16369"/>
        </table:table-row>
        <table:table-row table:style-name="ro1">
          <table:table-cell table:style-name="ce394" table:formula="of:=+[$'TERREN Y OBR CIV'.B13]" office:value-type="string" office:string-value="Listones  2&quot;x3&quot;x 3.5 m" calcext:value-type="string">
            <text:p>Listones <text:s/>2"x3"x 3.5 m</text:p>
          </table:table-cell>
          <table:table-cell table:style-name="ce403" table:formula="of:=+[$'TERREN Y OBR CIV'.F13]" office:value-type="float" office:value="2400" calcext:value-type="float">
            <text:p>2400.00</text:p>
          </table:table-cell>
          <table:table-cell table:style-name="ce413"/>
          <table:table-cell table:style-name="ce413" table:formula="of:=+[.B18]" office:value-type="float" office:value="2400" calcext:value-type="float">
            <text:p>2,400.00</text:p>
          </table:table-cell>
          <table:table-cell/>
          <table:table-cell table:style-name="ce425" table:formula="of:=+[.F17]-[.F16]" office:value-type="float" office:value="0" calcext:value-type="float">
            <text:p><text:s/>- <text:s text:c="2"/></text:p>
          </table:table-cell>
          <table:table-cell/>
          <table:table-cell table:style-name="ce432" table:formula="of:=+[$'TERREN Y OBR CIV'.B13]" office:value-type="string" office:string-value="Listones  2&quot;x3&quot;x 3.5 m" calcext:value-type="string">
            <text:p>Listones <text:s/>2"x3"x 3.5 m</text:p>
          </table:table-cell>
          <table:table-cell table:style-name="ce438" table:formula="of:=+[$'TERREN Y OBR CIV'.C13]" office:value-type="string" office:string-value="und" calcext:value-type="string">
            <text:p>und</text:p>
          </table:table-cell>
          <table:table-cell table:style-name="ce438" table:formula="of:=+[$'TERREN Y OBR CIV'.D13]" office:value-type="float" office:value="240" calcext:value-type="float">
            <text:p>240</text:p>
          </table:table-cell>
          <table:table-cell table:style-name="ce447" table:formula="of:=+[.B18]" office:value-type="float" office:value="2400" calcext:value-type="float">
            <text:p>2,400.00</text:p>
          </table:table-cell>
          <table:table-cell table:style-name="ce450" table:formula="of:=+[.K18]" office:value-type="float" office:value="2400" calcext:value-type="float">
            <text:p>2,400.00</text:p>
          </table:table-cell>
          <table:table-cell table:style-name="ce464"/>
          <table:table-cell table:style-name="ce462"/>
          <table:table-cell table:style-name="ce462" table:formula="of:=IF(SUM([.M18:.N18])&gt;0;SUM([.M18:.N18]);&quot;&quot;)">
            <text:p/>
          </table:table-cell>
          <table:table-cell table:number-columns-repeated="16369"/>
        </table:table-row>
        <table:table-row table:style-name="ro1">
          <table:table-cell table:style-name="ce394" table:formula="of:=+[$'TERREN Y OBR CIV'.B14]" office:value-type="string" office:string-value="Madera eucalipto rollizo 6&quot;x9m" calcext:value-type="string">
            <text:p>Madera eucalipto rollizo 6"x9m</text:p>
          </table:table-cell>
          <table:table-cell table:style-name="ce403" table:formula="of:=+[$'TERREN Y OBR CIV'.F14]" office:value-type="float" office:value="1680" calcext:value-type="float">
            <text:p>1680.00</text:p>
          </table:table-cell>
          <table:table-cell table:style-name="ce413" table:formula="of:=+[.B19]" office:value-type="float" office:value="1680" calcext:value-type="float">
            <text:p>1,680.00</text:p>
          </table:table-cell>
          <table:table-cell table:style-name="ce413"/>
          <table:table-cell table:style-name="ce421"/>
          <table:table-cell table:number-columns-repeated="2"/>
          <table:table-cell table:style-name="ce432" table:formula="of:=+[$'TERREN Y OBR CIV'.B14]" office:value-type="string" office:string-value="Madera eucalipto rollizo 6&quot;x9m" calcext:value-type="string">
            <text:p>Madera eucalipto rollizo 6"x9m</text:p>
          </table:table-cell>
          <table:table-cell table:style-name="ce438" table:formula="of:=+[$'TERREN Y OBR CIV'.C14]" office:value-type="string" office:string-value="und" calcext:value-type="string">
            <text:p>und</text:p>
          </table:table-cell>
          <table:table-cell table:style-name="ce438" table:formula="of:=+[$'TERREN Y OBR CIV'.D14]" office:value-type="float" office:value="24" calcext:value-type="float">
            <text:p>24</text:p>
          </table:table-cell>
          <table:table-cell table:style-name="ce447" table:formula="of:=+[.B19]" office:value-type="float" office:value="1680" calcext:value-type="float">
            <text:p>1,680.00</text:p>
          </table:table-cell>
          <table:table-cell table:style-name="ce450"/>
          <table:table-cell table:style-name="ce464"/>
          <table:table-cell table:style-name="ce462" table:formula="of:=+[.K19]" office:value-type="float" office:value="1680" calcext:value-type="float">
            <text:p>1,680.00</text:p>
          </table:table-cell>
          <table:table-cell table:style-name="ce462" table:formula="of:=IF(SUM([.M19:.N19])&gt;0;SUM([.M19:.N19]);&quot;&quot;)" office:value-type="float" office:value="1680" calcext:value-type="float">
            <text:p>1,680.00</text:p>
          </table:table-cell>
          <table:table-cell table:number-columns-repeated="16369"/>
        </table:table-row>
        <table:table-row table:style-name="ro1">
          <table:table-cell table:style-name="ce394" table:formula="of:=+[$'TERREN Y OBR CIV'.B15]" office:value-type="string" office:string-value="Malla revestido venilo color verde  3/4x3/4&quot; calib 1 mm x30 m" calcext:value-type="string">
            <text:p>Malla revestido venilo color verde <text:s/>3/4x3/4" calib 1 mm x30 m</text:p>
          </table:table-cell>
          <table:table-cell table:style-name="ce403" table:formula="of:=+[$'TERREN Y OBR CIV'.F15]" office:value-type="float" office:value="2960" calcext:value-type="float">
            <text:p>2960.00</text:p>
          </table:table-cell>
          <table:table-cell table:style-name="ce413"/>
          <table:table-cell table:style-name="ce413" table:formula="of:=+[.B20]" office:value-type="float" office:value="2960" calcext:value-type="float">
            <text:p>2,960.00</text:p>
          </table:table-cell>
          <table:table-cell table:style-name="ce421"/>
          <table:table-cell table:style-name="ce426"/>
          <table:table-cell/>
          <table:table-cell table:style-name="ce432" table:formula="of:=+[$'TERREN Y OBR CIV'.B15]" office:value-type="string" office:string-value="Malla revestido venilo color verde  3/4x3/4&quot; calib 1 mm x30 m" calcext:value-type="string">
            <text:p>Malla revestido venilo color verde <text:s/>3/4x3/4" calib 1 mm x30 m</text:p>
          </table:table-cell>
          <table:table-cell table:style-name="ce438" table:formula="of:=+[$'TERREN Y OBR CIV'.C15]" office:value-type="string" office:string-value="roll" calcext:value-type="string">
            <text:p>roll</text:p>
          </table:table-cell>
          <table:table-cell table:style-name="ce438" table:formula="of:=+[$'TERREN Y OBR CIV'.D15]" office:value-type="float" office:value="16" calcext:value-type="float">
            <text:p>16</text:p>
          </table:table-cell>
          <table:table-cell table:style-name="ce447" table:formula="of:=+[.B20]" office:value-type="float" office:value="2960" calcext:value-type="float">
            <text:p>2,960.00</text:p>
          </table:table-cell>
          <table:table-cell table:style-name="ce450" table:formula="of:=[.K20]" office:value-type="float" office:value="2960" calcext:value-type="float">
            <text:p>2,960.00</text:p>
          </table:table-cell>
          <table:table-cell table:style-name="ce464"/>
          <table:table-cell table:style-name="ce462"/>
          <table:table-cell table:style-name="ce462" table:formula="of:=IF(SUM([.M20:.N20])&gt;0;SUM([.M20:.N20]);&quot;&quot;)">
            <text:p/>
          </table:table-cell>
          <table:table-cell table:number-columns-repeated="16369"/>
        </table:table-row>
        <table:table-row table:style-name="ro1">
          <table:table-cell table:style-name="ce394" table:formula="of:=+[$'TERREN Y OBR CIV'.B16]" office:value-type="string" office:string-value="Ventana V1  (1.00x0.50)" calcext:value-type="string">
            <text:p>Ventana V1 <text:s/>(1.00x0.50)</text:p>
          </table:table-cell>
          <table:table-cell table:style-name="ce403" table:formula="of:=+[$'TERREN Y OBR CIV'.F16]" office:value-type="float" office:value="640" calcext:value-type="float">
            <text:p>640.00</text:p>
          </table:table-cell>
          <table:table-cell table:style-name="ce413"/>
          <table:table-cell table:style-name="ce413" table:formula="of:=+[.B21]" office:value-type="float" office:value="640" calcext:value-type="float">
            <text:p>640.00</text:p>
          </table:table-cell>
          <table:table-cell table:style-name="ce421"/>
          <table:table-cell table:number-columns-repeated="2"/>
          <table:table-cell table:style-name="ce432" table:formula="of:=+[$'TERREN Y OBR CIV'.B16]" office:value-type="string" office:string-value="Ventana V1  (1.00x0.50)" calcext:value-type="string">
            <text:p>Ventana V1 <text:s/>(1.00x0.50)</text:p>
          </table:table-cell>
          <table:table-cell table:style-name="ce438" table:formula="of:=+[$'TERREN Y OBR CIV'.C16]" office:value-type="string" office:string-value="und" calcext:value-type="string">
            <text:p>und</text:p>
          </table:table-cell>
          <table:table-cell table:style-name="ce438" table:formula="of:=+[$'TERREN Y OBR CIV'.D16]" office:value-type="float" office:value="32" calcext:value-type="float">
            <text:p>32</text:p>
          </table:table-cell>
          <table:table-cell table:style-name="ce447" table:formula="of:=+[.B21]" office:value-type="float" office:value="640" calcext:value-type="float">
            <text:p>640.00</text:p>
          </table:table-cell>
          <table:table-cell table:style-name="ce450" table:formula="of:=+[.K21]" office:value-type="float" office:value="640" calcext:value-type="float">
            <text:p>640.00</text:p>
          </table:table-cell>
          <table:table-cell table:style-name="ce464"/>
          <table:table-cell table:style-name="ce462"/>
          <table:table-cell table:style-name="ce462" table:formula="of:=IF(SUM([.M21:.N21])&gt;0;SUM([.M21:.N21]);&quot;&quot;)">
            <text:p/>
          </table:table-cell>
          <table:table-cell table:number-columns-repeated="16369"/>
        </table:table-row>
        <table:table-row table:style-name="ro1">
          <table:table-cell table:style-name="ce394" table:formula="of:=+[$'TERREN Y OBR CIV'.B17]" office:value-type="string" office:string-value="Alambre negro  N° 16" calcext:value-type="string">
            <text:p>Alambre negro <text:s/>N° 16</text:p>
          </table:table-cell>
          <table:table-cell table:style-name="ce403" table:formula="of:=+[$'TERREN Y OBR CIV'.F17]" office:value-type="float" office:value="200" calcext:value-type="float">
            <text:p>200.00</text:p>
          </table:table-cell>
          <table:table-cell table:style-name="ce413"/>
          <table:table-cell table:style-name="ce413" table:formula="of:=+[.B22]" office:value-type="float" office:value="200" calcext:value-type="float">
            <text:p>200.00</text:p>
          </table:table-cell>
          <table:table-cell table:number-columns-repeated="3"/>
          <table:table-cell table:style-name="ce432" table:formula="of:=+[$'TERREN Y OBR CIV'.B17]" office:value-type="string" office:string-value="Alambre negro  N° 16" calcext:value-type="string">
            <text:p>Alambre negro <text:s/>N° 16</text:p>
          </table:table-cell>
          <table:table-cell table:style-name="ce438" table:formula="of:=+[$'TERREN Y OBR CIV'.C17]" office:value-type="string" office:string-value="und" calcext:value-type="string">
            <text:p>und</text:p>
          </table:table-cell>
          <table:table-cell table:style-name="ce438" table:formula="of:=+[$'TERREN Y OBR CIV'.D17]" office:value-type="float" office:value="40" calcext:value-type="float">
            <text:p>40</text:p>
          </table:table-cell>
          <table:table-cell table:style-name="ce447" table:formula="of:=+[.B22]" office:value-type="float" office:value="200" calcext:value-type="float">
            <text:p>200.00</text:p>
          </table:table-cell>
          <table:table-cell table:style-name="ce450" table:formula="of:=+[.K22]" office:value-type="float" office:value="200" calcext:value-type="float">
            <text:p>200.00</text:p>
          </table:table-cell>
          <table:table-cell table:style-name="ce464"/>
          <table:table-cell table:style-name="ce462"/>
          <table:table-cell table:style-name="ce462" table:formula="of:=IF(SUM([.M22:.N22])&gt;0;SUM([.M22:.N22]);&quot;&quot;)">
            <text:p/>
          </table:table-cell>
          <table:table-cell table:number-columns-repeated="16369"/>
        </table:table-row>
        <table:table-row table:style-name="ro1">
          <table:table-cell table:style-name="ce394" table:formula="of:=+[$'TERREN Y OBR CIV'.B18]" office:value-type="string" office:string-value="Puerta madera y calamina P1 (1.20x2.00)" calcext:value-type="string">
            <text:p>Puerta madera y calamina P1 (1.20x2.00)</text:p>
          </table:table-cell>
          <table:table-cell table:style-name="ce403" table:formula="of:=+[$'TERREN Y OBR CIV'.F18]" office:value-type="float" office:value="640" calcext:value-type="float">
            <text:p>640.00</text:p>
          </table:table-cell>
          <table:table-cell table:style-name="ce413"/>
          <table:table-cell table:style-name="ce413" table:formula="of:=+[.B23]" office:value-type="float" office:value="640" calcext:value-type="float">
            <text:p>640.00</text:p>
          </table:table-cell>
          <table:table-cell table:number-columns-repeated="3"/>
          <table:table-cell table:style-name="ce432" table:formula="of:=+[$'TERREN Y OBR CIV'.B18]" office:value-type="string" office:string-value="Puerta madera y calamina P1 (1.20x2.00)" calcext:value-type="string">
            <text:p>Puerta madera y calamina P1 (1.20x2.00)</text:p>
          </table:table-cell>
          <table:table-cell table:style-name="ce438" table:formula="of:=+[$'TERREN Y OBR CIV'.C18]" office:value-type="string" office:string-value="und" calcext:value-type="string">
            <text:p>und</text:p>
          </table:table-cell>
          <table:table-cell table:style-name="ce438" table:formula="of:=+[$'TERREN Y OBR CIV'.D18]" office:value-type="float" office:value="8" calcext:value-type="float">
            <text:p>8</text:p>
          </table:table-cell>
          <table:table-cell table:style-name="ce447" table:formula="of:=+[.B23]" office:value-type="float" office:value="640" calcext:value-type="float">
            <text:p>640.00</text:p>
          </table:table-cell>
          <table:table-cell table:style-name="ce450" table:formula="of:=+[.K23]" office:value-type="float" office:value="640" calcext:value-type="float">
            <text:p>640.00</text:p>
          </table:table-cell>
          <table:table-cell table:style-name="ce464"/>
          <table:table-cell table:style-name="ce462"/>
          <table:table-cell table:style-name="ce462" table:formula="of:=IF(SUM([.M23:.N23])&gt;0;SUM([.M23:.N23]);&quot;&quot;)">
            <text:p/>
          </table:table-cell>
          <table:table-cell office:value-type="float" office:value="595.959932144191" calcext:value-type="float">
            <text:p>595.959932144191</text:p>
          </table:table-cell>
          <table:table-cell table:number-columns-repeated="16368"/>
        </table:table-row>
        <table:table-row table:style-name="ro1">
          <table:table-cell table:style-name="ce394" table:formula="of:=+[$'TERREN Y OBR CIV'.B19]" office:value-type="string" office:string-value="Calamina de 0.22 mm de 3.60X 0.8 m" calcext:value-type="string">
            <text:p>Calamina de 0.22 mm de 3.60X 0.8 m</text:p>
          </table:table-cell>
          <table:table-cell table:style-name="ce403" table:formula="of:=+[$'TERREN Y OBR CIV'.F19]" office:value-type="float" office:value="4784" calcext:value-type="float">
            <text:p>4784.00</text:p>
          </table:table-cell>
          <table:table-cell table:style-name="ce413"/>
          <table:table-cell table:style-name="ce413" table:formula="of:=+[.B24]" office:value-type="float" office:value="4784" calcext:value-type="float">
            <text:p>4,784.00</text:p>
          </table:table-cell>
          <table:table-cell table:number-columns-repeated="3"/>
          <table:table-cell table:style-name="ce432" table:formula="of:=+[$'TERREN Y OBR CIV'.B19]" office:value-type="string" office:string-value="Calamina de 0.22 mm de 3.60X 0.8 m" calcext:value-type="string">
            <text:p>Calamina de 0.22 mm de 3.60X 0.8 m</text:p>
          </table:table-cell>
          <table:table-cell table:style-name="ce438" table:formula="of:=+[$'TERREN Y OBR CIV'.C19]" office:value-type="string" office:string-value="pln" calcext:value-type="string">
            <text:p>pln</text:p>
          </table:table-cell>
          <table:table-cell table:style-name="ce438" table:formula="of:=+[$'TERREN Y OBR CIV'.D19]" office:value-type="float" office:value="208" calcext:value-type="float">
            <text:p>208</text:p>
          </table:table-cell>
          <table:table-cell table:style-name="ce447" table:formula="of:=+[.B24]" office:value-type="float" office:value="4784" calcext:value-type="float">
            <text:p>4,784.00</text:p>
          </table:table-cell>
          <table:table-cell table:style-name="ce450" table:formula="of:=+[.K24]" office:value-type="float" office:value="4784" calcext:value-type="float">
            <text:p>4,784.00</text:p>
          </table:table-cell>
          <table:table-cell table:style-name="ce464"/>
          <table:table-cell table:style-name="ce462"/>
          <table:table-cell table:style-name="ce462" table:formula="of:=IF(SUM([.M24:.N24])&gt;0;SUM([.M24:.N24]);&quot;&quot;)">
            <text:p/>
          </table:table-cell>
          <table:table-cell table:number-columns-repeated="16369"/>
        </table:table-row>
        <table:table-row table:style-name="ro1">
          <table:table-cell table:style-name="ce394" table:formula="of:=+[$'TERREN Y OBR CIV'.B20]" office:value-type="string" office:string-value="Calamina transparente 3.60*0.8 m (Fibra forte)" calcext:value-type="string">
            <text:p>Calamina transparente 3.60*0.8 m (Fibra forte)</text:p>
          </table:table-cell>
          <table:table-cell table:style-name="ce403" table:formula="of:=+[$'TERREN Y OBR CIV'.F20]" office:value-type="float" office:value="880" calcext:value-type="float">
            <text:p>880.00</text:p>
          </table:table-cell>
          <table:table-cell table:style-name="ce413"/>
          <table:table-cell table:style-name="ce413" table:formula="of:=+[.B25]" office:value-type="float" office:value="880" calcext:value-type="float">
            <text:p>880.00</text:p>
          </table:table-cell>
          <table:table-cell table:number-columns-repeated="3"/>
          <table:table-cell table:style-name="ce432" table:formula="of:=+[$'TERREN Y OBR CIV'.B20]" office:value-type="string" office:string-value="Calamina transparente 3.60*0.8 m (Fibra forte)" calcext:value-type="string">
            <text:p>Calamina transparente 3.60*0.8 m (Fibra forte)</text:p>
          </table:table-cell>
          <table:table-cell table:style-name="ce438" table:formula="of:=+[$'TERREN Y OBR CIV'.C20]" office:value-type="string" office:string-value="pln" calcext:value-type="string">
            <text:p>pln</text:p>
          </table:table-cell>
          <table:table-cell table:style-name="ce438" table:formula="of:=+[$'TERREN Y OBR CIV'.D20]" office:value-type="float" office:value="16" calcext:value-type="float">
            <text:p>16</text:p>
          </table:table-cell>
          <table:table-cell table:style-name="ce447" table:formula="of:=+[.B25]" office:value-type="float" office:value="880" calcext:value-type="float">
            <text:p>880.00</text:p>
          </table:table-cell>
          <table:table-cell table:style-name="ce450" table:formula="of:=+[.K25]" office:value-type="float" office:value="880" calcext:value-type="float">
            <text:p>880.00</text:p>
          </table:table-cell>
          <table:table-cell table:style-name="ce464"/>
          <table:table-cell table:style-name="ce462"/>
          <table:table-cell table:style-name="ce462" table:formula="of:=IF(SUM([.M25:.N25])&gt;0;SUM([.M25:.N25]);&quot;&quot;)">
            <text:p/>
          </table:table-cell>
          <table:table-cell table:style-name="ce424" table:formula="of:=+[.N23]-[.P23]" office:value-type="float" office:value="-595.959932144191" calcext:value-type="float">
            <text:p>-595.96</text:p>
          </table:table-cell>
          <table:table-cell table:number-columns-repeated="16368"/>
        </table:table-row>
        <table:table-row table:style-name="ro1">
          <table:table-cell table:style-name="ce394" table:formula="of:=+[$'TERREN Y OBR CIV'.B21]" office:value-type="string" office:string-value="Tubo PVC diam 1/2&quot; C-10" calcext:value-type="string">
            <text:p>Tubo PVC diam 1/2" C-10</text:p>
          </table:table-cell>
          <table:table-cell table:style-name="ce403" table:formula="of:=+[$'TERREN Y OBR CIV'.F21]" office:value-type="float" office:value="480" calcext:value-type="float">
            <text:p>480.00</text:p>
          </table:table-cell>
          <table:table-cell table:style-name="ce413"/>
          <table:table-cell table:style-name="ce413" table:formula="of:=+[.B26]" office:value-type="float" office:value="480" calcext:value-type="float">
            <text:p>480.00</text:p>
          </table:table-cell>
          <table:table-cell table:number-columns-repeated="3"/>
          <table:table-cell table:style-name="ce432" table:formula="of:=+[$'TERREN Y OBR CIV'.B21]" office:value-type="string" office:string-value="Tubo PVC diam 1/2&quot; C-10" calcext:value-type="string">
            <text:p>Tubo PVC diam 1/2" C-10</text:p>
          </table:table-cell>
          <table:table-cell table:style-name="ce438" table:formula="of:=+[$'TERREN Y OBR CIV'.C21]" office:value-type="string" office:string-value="und" calcext:value-type="string">
            <text:p>und</text:p>
          </table:table-cell>
          <table:table-cell table:style-name="ce438" table:formula="of:=+[$'TERREN Y OBR CIV'.D21]" office:value-type="float" office:value="40" calcext:value-type="float">
            <text:p>40</text:p>
          </table:table-cell>
          <table:table-cell table:style-name="ce447" table:formula="of:=+[.B26]" office:value-type="float" office:value="480" calcext:value-type="float">
            <text:p>480.00</text:p>
          </table:table-cell>
          <table:table-cell table:style-name="ce450" table:formula="of:=+[.K26]" office:value-type="float" office:value="480" calcext:value-type="float">
            <text:p>480.00</text:p>
          </table:table-cell>
          <table:table-cell table:style-name="ce464"/>
          <table:table-cell table:style-name="ce462"/>
          <table:table-cell table:style-name="ce462" table:formula="of:=IF(SUM([.M26:.N26])&gt;0;SUM([.M26:.N26]);&quot;&quot;)">
            <text:p/>
          </table:table-cell>
          <table:table-cell table:number-columns-repeated="16369"/>
        </table:table-row>
        <table:table-row table:style-name="ro1">
          <table:table-cell table:style-name="ce394" table:formula="of:=+[$'TERREN Y OBR CIV'.B22]" office:value-type="string" office:string-value="Cinta teflon" calcext:value-type="string">
            <text:p>Cinta teflon</text:p>
          </table:table-cell>
          <table:table-cell table:style-name="ce403" table:formula="of:=+[$'TERREN Y OBR CIV'.F22]" office:value-type="float" office:value="16" calcext:value-type="float">
            <text:p>16.00</text:p>
          </table:table-cell>
          <table:table-cell table:style-name="ce413"/>
          <table:table-cell table:style-name="ce413" table:formula="of:=+[.B27]" office:value-type="float" office:value="16" calcext:value-type="float">
            <text:p>16.00</text:p>
          </table:table-cell>
          <table:table-cell table:number-columns-repeated="3"/>
          <table:table-cell table:style-name="ce432" table:formula="of:=+[$'TERREN Y OBR CIV'.B22]" office:value-type="string" office:string-value="Cinta teflon" calcext:value-type="string">
            <text:p>Cinta teflon</text:p>
          </table:table-cell>
          <table:table-cell table:style-name="ce438" table:formula="of:=+[$'TERREN Y OBR CIV'.C22]" office:value-type="string" office:string-value="und" calcext:value-type="string">
            <text:p>und</text:p>
          </table:table-cell>
          <table:table-cell table:style-name="ce438" table:formula="of:=+[$'TERREN Y OBR CIV'.D22]" office:value-type="float" office:value="16" calcext:value-type="float">
            <text:p>16</text:p>
          </table:table-cell>
          <table:table-cell table:style-name="ce447" table:formula="of:=+[.B27]" office:value-type="float" office:value="16" calcext:value-type="float">
            <text:p>16.00</text:p>
          </table:table-cell>
          <table:table-cell table:style-name="ce450" table:formula="of:=+[.K27]" office:value-type="float" office:value="16" calcext:value-type="float">
            <text:p>16.00</text:p>
          </table:table-cell>
          <table:table-cell table:style-name="ce464"/>
          <table:table-cell table:style-name="ce462"/>
          <table:table-cell table:style-name="ce462" table:formula="of:=IF(SUM([.M27:.N27])&gt;0;SUM([.M27:.N27]);&quot;&quot;)">
            <text:p/>
          </table:table-cell>
          <table:table-cell table:number-columns-repeated="16369"/>
        </table:table-row>
        <table:table-row table:style-name="ro1">
          <table:table-cell table:style-name="ce394" table:formula="of:=+[$'TERREN Y OBR CIV'.B23]" office:value-type="string" office:string-value="Pagamento PVC 237 ml" calcext:value-type="string">
            <text:p>Pagamento PVC 237 ml</text:p>
          </table:table-cell>
          <table:table-cell table:style-name="ce403" table:formula="of:=+[$'TERREN Y OBR CIV'.F23]" office:value-type="float" office:value="96" calcext:value-type="float">
            <text:p>96.00</text:p>
          </table:table-cell>
          <table:table-cell table:style-name="ce413"/>
          <table:table-cell table:style-name="ce413" table:formula="of:=+[.B28]" office:value-type="float" office:value="96" calcext:value-type="float">
            <text:p>96.00</text:p>
          </table:table-cell>
          <table:table-cell table:number-columns-repeated="3"/>
          <table:table-cell table:style-name="ce432" table:formula="of:=+[$'TERREN Y OBR CIV'.B23]" office:value-type="string" office:string-value="Pagamento PVC 237 ml" calcext:value-type="string">
            <text:p>Pagamento PVC 237 ml</text:p>
          </table:table-cell>
          <table:table-cell table:style-name="ce438" table:formula="of:=+[$'TERREN Y OBR CIV'.C23]" office:value-type="string" office:string-value="und" calcext:value-type="string">
            <text:p>und</text:p>
          </table:table-cell>
          <table:table-cell table:style-name="ce438" table:formula="of:=+[$'TERREN Y OBR CIV'.D23]" office:value-type="float" office:value="8" calcext:value-type="float">
            <text:p>8</text:p>
          </table:table-cell>
          <table:table-cell table:style-name="ce447" table:formula="of:=+[.B28]" office:value-type="float" office:value="96" calcext:value-type="float">
            <text:p>96.00</text:p>
          </table:table-cell>
          <table:table-cell table:style-name="ce450" table:formula="of:=+[.K28]" office:value-type="float" office:value="96" calcext:value-type="float">
            <text:p>96.00</text:p>
          </table:table-cell>
          <table:table-cell table:style-name="ce464"/>
          <table:table-cell table:style-name="ce462"/>
          <table:table-cell table:style-name="ce462" table:formula="of:=IF(SUM([.M28:.N28])&gt;0;SUM([.M28:.N28]);&quot;&quot;)">
            <text:p/>
          </table:table-cell>
          <table:table-cell table:number-columns-repeated="16369"/>
        </table:table-row>
        <table:table-row table:style-name="ro1">
          <table:table-cell table:style-name="ce394" table:formula="of:=+[$'TERREN Y OBR CIV'.B24]" office:value-type="string" office:string-value="Bebedero Automatico " calcext:value-type="string">
            <text:p>Bebedero Automatico </text:p>
          </table:table-cell>
          <table:table-cell table:style-name="ce403" table:formula="of:=+[$'TERREN Y OBR CIV'.F24]" office:value-type="float" office:value="2112" calcext:value-type="float">
            <text:p>2112.00</text:p>
          </table:table-cell>
          <table:table-cell table:style-name="ce413"/>
          <table:table-cell table:style-name="ce413" table:formula="of:=+[.B29]" office:value-type="float" office:value="2112" calcext:value-type="float">
            <text:p>2,112.00</text:p>
          </table:table-cell>
          <table:table-cell table:number-columns-repeated="3"/>
          <table:table-cell table:style-name="ce432" table:formula="of:=+[$'TERREN Y OBR CIV'.B24]" office:value-type="string" office:string-value="Bebedero Automatico " calcext:value-type="string">
            <text:p>Bebedero Automatico </text:p>
          </table:table-cell>
          <table:table-cell table:style-name="ce438" table:formula="of:=+[$'TERREN Y OBR CIV'.C24]" office:value-type="string" office:string-value="und" calcext:value-type="string">
            <text:p>und</text:p>
          </table:table-cell>
          <table:table-cell table:style-name="ce438" table:formula="of:=+[$'TERREN Y OBR CIV'.D24]" office:value-type="float" office:value="352" calcext:value-type="float">
            <text:p>352</text:p>
          </table:table-cell>
          <table:table-cell table:style-name="ce447" table:formula="of:=+[.B29]" office:value-type="float" office:value="2112" calcext:value-type="float">
            <text:p>2,112.00</text:p>
          </table:table-cell>
          <table:table-cell table:style-name="ce450" table:formula="of:=+[.K29]" office:value-type="float" office:value="2112" calcext:value-type="float">
            <text:p>2,112.00</text:p>
          </table:table-cell>
          <table:table-cell table:style-name="ce464"/>
          <table:table-cell table:style-name="ce462"/>
          <table:table-cell table:style-name="ce462" table:formula="of:=IF(SUM([.M29:.N29])&gt;0;SUM([.M29:.N29]);&quot;&quot;)">
            <text:p/>
          </table:table-cell>
          <table:table-cell table:number-columns-repeated="16369"/>
        </table:table-row>
        <table:table-row table:style-name="ro1">
          <table:table-cell table:style-name="ce394" table:formula="of:=+[$'TERREN Y OBR CIV'.B25]" office:value-type="string" office:string-value="Cuyes existentes del galpon" calcext:value-type="string">
            <text:p>Cuyes existentes del galpon</text:p>
          </table:table-cell>
          <table:table-cell table:style-name="ce403" table:formula="of:=+[$'TERREN Y OBR CIV'.F25]" office:value-type="float" office:value="5382" calcext:value-type="float">
            <text:p>5382.00</text:p>
          </table:table-cell>
          <table:table-cell table:style-name="ce413" table:formula="of:=+[.B30]" office:value-type="float" office:value="5382" calcext:value-type="float">
            <text:p>5,382.00</text:p>
          </table:table-cell>
          <table:table-cell table:style-name="ce413"/>
          <table:table-cell table:number-columns-repeated="3"/>
          <table:table-cell table:style-name="ce432" table:formula="of:=+[$'TERREN Y OBR CIV'.B25]" office:value-type="string" office:string-value="Cuyes existentes del galpon" calcext:value-type="string">
            <text:p>Cuyes existentes del galpon</text:p>
          </table:table-cell>
          <table:table-cell table:style-name="ce438" table:formula="of:=+[$'TERREN Y OBR CIV'.C25]" office:value-type="string" office:string-value="und" calcext:value-type="string">
            <text:p>und</text:p>
          </table:table-cell>
          <table:table-cell table:style-name="ce438" table:formula="of:=+[$'TERREN Y OBR CIV'.D25]" office:value-type="float" office:value="299" calcext:value-type="float">
            <text:p>299</text:p>
          </table:table-cell>
          <table:table-cell table:style-name="ce447" table:formula="of:=+[.B30]" office:value-type="float" office:value="5382" calcext:value-type="float">
            <text:p>5,382.00</text:p>
          </table:table-cell>
          <table:table-cell table:style-name="ce450"/>
          <table:table-cell table:style-name="ce464"/>
          <table:table-cell table:style-name="ce462" table:formula="of:=+[.K30]" office:value-type="float" office:value="5382" calcext:value-type="float">
            <text:p>5,382.00</text:p>
          </table:table-cell>
          <table:table-cell table:style-name="ce462" table:formula="of:=IF(SUM([.M30:.N30])&gt;0;SUM([.M30:.N30]);&quot;&quot;)" office:value-type="float" office:value="5382" calcext:value-type="float">
            <text:p>5,382.00</text:p>
          </table:table-cell>
          <table:table-cell table:number-columns-repeated="16369"/>
        </table:table-row>
        <table:table-row table:style-name="ro1">
          <table:table-cell table:style-name="ce394" table:formula="of:=+[$'TERREN Y OBR CIV'.B26]" office:value-type="string" office:string-value="Operario" calcext:value-type="string">
            <text:p>Operario</text:p>
          </table:table-cell>
          <table:table-cell table:style-name="ce403" table:formula="of:=+[$'TERREN Y OBR CIV'.F26]" office:value-type="float" office:value="5400" calcext:value-type="float">
            <text:p>5400.00</text:p>
          </table:table-cell>
          <table:table-cell table:style-name="ce413"/>
          <table:table-cell table:style-name="ce413" table:formula="of:=+[.B31]" office:value-type="float" office:value="5400" calcext:value-type="float">
            <text:p>5,400.00</text:p>
          </table:table-cell>
          <table:table-cell table:number-columns-repeated="3"/>
          <table:table-cell table:style-name="ce432" table:formula="of:=+[$'TERREN Y OBR CIV'.B26]" office:value-type="string" office:string-value="Operario" calcext:value-type="string">
            <text:p>Operario</text:p>
          </table:table-cell>
          <table:table-cell table:style-name="ce438" table:formula="of:=+[$'TERREN Y OBR CIV'.C26]" office:value-type="string" office:string-value="Jor" calcext:value-type="string">
            <text:p>Jor</text:p>
          </table:table-cell>
          <table:table-cell table:style-name="ce438" table:formula="of:=+[$'TERREN Y OBR CIV'.D26]" office:value-type="float" office:value="90" calcext:value-type="float">
            <text:p>90</text:p>
          </table:table-cell>
          <table:table-cell table:style-name="ce447" table:formula="of:=+[.B31]" office:value-type="float" office:value="5400" calcext:value-type="float">
            <text:p>5,400.00</text:p>
          </table:table-cell>
          <table:table-cell table:style-name="ce450" table:formula="of:=+[.K31]" office:value-type="float" office:value="5400" calcext:value-type="float">
            <text:p>5,400.00</text:p>
          </table:table-cell>
          <table:table-cell table:style-name="ce465"/>
          <table:table-cell table:style-name="ce462" table:number-columns-repeated="2"/>
          <table:table-cell table:number-columns-repeated="16369"/>
        </table:table-row>
        <table:table-row table:style-name="ro1">
          <table:table-cell table:style-name="ce393" table:formula="of:=+[$'TERREN Y OBR CIV'.B27]" office:value-type="string" office:string-value="III. INSTALACION DE PASTOS" calcext:value-type="string">
            <text:p>III. INSTALACION DE PASTOS</text:p>
          </table:table-cell>
          <table:table-cell table:style-name="ce404" table:formula="of:=SUM([.B33:.B40])" office:value-type="float" office:value="23482" calcext:value-type="float">
            <text:p>23482.00</text:p>
          </table:table-cell>
          <table:table-cell table:style-name="ce414" table:formula="of:=SUM([.C33:.C40])" office:value-type="float" office:value="2460" calcext:value-type="float">
            <text:p>2,460.00</text:p>
          </table:table-cell>
          <table:table-cell table:style-name="ce414" table:formula="of:=SUM([.D33:.D40])" office:value-type="float" office:value="21022" calcext:value-type="float">
            <text:p>21,022.00</text:p>
          </table:table-cell>
          <table:table-cell table:style-name="ce360" table:number-columns-repeated="3"/>
          <table:table-cell table:style-name="ce431" table:formula="of:=+[.A32]" office:value-type="string" office:string-value="III. INSTALACION DE PASTOS" calcext:value-type="string">
            <text:p>III. INSTALACION DE PASTOS</text:p>
          </table:table-cell>
          <table:table-cell table:style-name="ce431" table:number-columns-repeated="2"/>
          <table:table-cell table:style-name="ce448" table:formula="of:=SUM([.K33:.K40])" office:value-type="float" office:value="23482" calcext:value-type="float">
            <text:p>23,482.00</text:p>
          </table:table-cell>
          <table:table-cell table:style-name="ce448" table:formula="of:=SUM([.L33:.L40])" office:value-type="float" office:value="21022" calcext:value-type="float">
            <text:p>21,022.00</text:p>
          </table:table-cell>
          <table:table-cell table:style-name="ce463" table:formula="of:=SUM([.M33:.M40])" office:value-type="float" office:value="0" calcext:value-type="float">
            <text:p>0.00</text:p>
          </table:table-cell>
          <table:table-cell table:style-name="ce463" table:formula="of:=SUM([.N33:.N40])" office:value-type="float" office:value="2460" calcext:value-type="float">
            <text:p>2,460.00</text:p>
          </table:table-cell>
          <table:table-cell table:style-name="ce463" table:formula="of:=SUM([.O33:.O40])" office:value-type="float" office:value="2460" calcext:value-type="float">
            <text:p>2,460.00</text:p>
          </table:table-cell>
          <table:table-cell table:style-name="ce360" table:number-columns-repeated="16369"/>
        </table:table-row>
        <table:table-row table:style-name="ro1">
          <table:table-cell table:style-name="ce394" table:formula="of:=+[$'TERREN Y OBR CIV'.B28]" office:value-type="string" office:string-value="Manguera  HDP DIAM 1&quot;  X 100 M c-8" calcext:value-type="string">
            <text:p>Manguera <text:s/>HDP DIAM 1" <text:s/>X 100 M c-8</text:p>
          </table:table-cell>
          <table:table-cell table:style-name="ce403" table:formula="of:=+[$'TERREN Y OBR CIV'.F28]" office:value-type="float" office:value="3720" calcext:value-type="float">
            <text:p>3720.00</text:p>
          </table:table-cell>
          <table:table-cell table:style-name="ce413"/>
          <table:table-cell table:style-name="ce413" table:formula="of:=+[.B33]" office:value-type="float" office:value="3720" calcext:value-type="float">
            <text:p>3,720.00</text:p>
          </table:table-cell>
          <table:table-cell table:number-columns-repeated="3"/>
          <table:table-cell table:style-name="ce432" table:formula="of:=+[$'TERREN Y OBR CIV'.B28]" office:value-type="string" office:string-value="Manguera  HDP DIAM 1&quot;  X 100 M c-8" calcext:value-type="string">
            <text:p>Manguera <text:s/>HDP DIAM 1" <text:s/>X 100 M c-8</text:p>
          </table:table-cell>
          <table:table-cell table:style-name="ce439" table:formula="of:=+[$'TERREN Y OBR CIV'.C28]" office:value-type="string" office:string-value="roll" calcext:value-type="string">
            <text:p>roll</text:p>
          </table:table-cell>
          <table:table-cell table:style-name="ce439" table:formula="of:=+[$'TERREN Y OBR CIV'.D28]" office:value-type="float" office:value="31" calcext:value-type="float">
            <text:p>31</text:p>
          </table:table-cell>
          <table:table-cell table:style-name="ce447" table:formula="of:=+[.B33]" office:value-type="float" office:value="3720" calcext:value-type="float">
            <text:p>3,720.00</text:p>
          </table:table-cell>
          <table:table-cell table:style-name="ce450" table:formula="of:=+[.K33]" office:value-type="float" office:value="3720" calcext:value-type="float">
            <text:p>3,720.00</text:p>
          </table:table-cell>
          <table:table-cell table:style-name="ce464"/>
          <table:table-cell table:style-name="ce468"/>
          <table:table-cell table:style-name="ce462" table:formula="of:=IF(SUM([.M33:.N33])&gt;0;SUM([.M33:.N33]);&quot;&quot;)">
            <text:p/>
          </table:table-cell>
          <table:table-cell table:number-columns-repeated="16369"/>
        </table:table-row>
        <table:table-row table:style-name="ro1">
          <table:table-cell table:style-name="ce394" table:formula="of:=+[$'TERREN Y OBR CIV'.B29]" office:value-type="string" office:string-value="Aspersor circular ibis 1&quot; para Presion 4 bares" calcext:value-type="string">
            <text:p>Aspersor circular ibis 1" para Presion 4 bares</text:p>
          </table:table-cell>
          <table:table-cell table:style-name="ce403" table:formula="of:=+[$'TERREN Y OBR CIV'.F29]" office:value-type="float" office:value="4340" calcext:value-type="float">
            <text:p>4340.00</text:p>
          </table:table-cell>
          <table:table-cell table:style-name="ce413"/>
          <table:table-cell table:style-name="ce413" table:formula="of:=+[.B34]" office:value-type="float" office:value="4340" calcext:value-type="float">
            <text:p>4,340.00</text:p>
          </table:table-cell>
          <table:table-cell table:number-columns-repeated="3"/>
          <table:table-cell table:style-name="ce432" table:formula="of:=+[$'TERREN Y OBR CIV'.B29]" office:value-type="string" office:string-value="Aspersor circular ibis 1&quot; para Presion 4 bares" calcext:value-type="string">
            <text:p>Aspersor circular ibis 1" para Presion 4 bares</text:p>
          </table:table-cell>
          <table:table-cell table:style-name="ce439" table:formula="of:=+[$'TERREN Y OBR CIV'.C29]" office:value-type="string" office:string-value="und" calcext:value-type="string">
            <text:p>und</text:p>
          </table:table-cell>
          <table:table-cell table:style-name="ce439" table:formula="of:=+[$'TERREN Y OBR CIV'.D29]" office:value-type="float" office:value="31" calcext:value-type="float">
            <text:p>31</text:p>
          </table:table-cell>
          <table:table-cell table:style-name="ce447" table:formula="of:=+[.B34]" office:value-type="float" office:value="4340" calcext:value-type="float">
            <text:p>4,340.00</text:p>
          </table:table-cell>
          <table:table-cell table:style-name="ce450" table:formula="of:=+[.K34]" office:value-type="float" office:value="4340" calcext:value-type="float">
            <text:p>4,340.00</text:p>
          </table:table-cell>
          <table:table-cell table:style-name="ce464"/>
          <table:table-cell table:style-name="ce468"/>
          <table:table-cell table:style-name="ce462" table:formula="of:=IF(SUM([.M34:.N34])&gt;0;SUM([.M34:.N34]);&quot;&quot;)">
            <text:p/>
          </table:table-cell>
          <table:table-cell table:number-columns-repeated="16369"/>
        </table:table-row>
        <table:table-row table:style-name="ro1">
          <table:table-cell table:style-name="ce394" table:formula="of:=+[$'TERREN Y OBR CIV'.B30]" office:value-type="string" office:string-value="Semilla de alfalfa Moapa" calcext:value-type="string">
            <text:p>Semilla de alfalfa Moapa</text:p>
          </table:table-cell>
          <table:table-cell table:style-name="ce403" table:formula="of:=+[$'TERREN Y OBR CIV'.F30]" office:value-type="float" office:value="1240" calcext:value-type="float">
            <text:p>1240.00</text:p>
          </table:table-cell>
          <table:table-cell table:style-name="ce413"/>
          <table:table-cell table:style-name="ce413" table:formula="of:=+[.B35]" office:value-type="float" office:value="1240" calcext:value-type="float">
            <text:p>1,240.00</text:p>
          </table:table-cell>
          <table:table-cell table:number-columns-repeated="3"/>
          <table:table-cell table:style-name="ce432" table:formula="of:=+[$'TERREN Y OBR CIV'.B30]" office:value-type="string" office:string-value="Semilla de alfalfa Moapa" calcext:value-type="string">
            <text:p>Semilla de alfalfa Moapa</text:p>
          </table:table-cell>
          <table:table-cell table:style-name="ce439" table:formula="of:=+[$'TERREN Y OBR CIV'.C30]" office:value-type="string" office:string-value="kg" calcext:value-type="string">
            <text:p>kg</text:p>
          </table:table-cell>
          <table:table-cell table:style-name="ce439" table:formula="of:=+[$'TERREN Y OBR CIV'.D30]" office:value-type="float" office:value="31" calcext:value-type="float">
            <text:p>31</text:p>
          </table:table-cell>
          <table:table-cell table:style-name="ce447" table:formula="of:=+[.B35]" office:value-type="float" office:value="1240" calcext:value-type="float">
            <text:p>1,240.00</text:p>
          </table:table-cell>
          <table:table-cell table:style-name="ce450" table:formula="of:=+[.K35]" office:value-type="float" office:value="1240" calcext:value-type="float">
            <text:p>1,240.00</text:p>
          </table:table-cell>
          <table:table-cell table:style-name="ce464"/>
          <table:table-cell table:style-name="ce468"/>
          <table:table-cell table:style-name="ce462" table:formula="of:=IF(SUM([.M35:.N35])&gt;0;SUM([.M35:.N35]);&quot;&quot;)">
            <text:p/>
          </table:table-cell>
          <table:table-cell table:number-columns-repeated="16369"/>
        </table:table-row>
        <table:table-row table:style-name="ro1">
          <table:table-cell table:style-name="ce394" table:formula="of:=+[$'TERREN Y OBR CIV'.B31]" office:value-type="string" office:string-value="Guano de corral (saco 50 kg)" calcext:value-type="string">
            <text:p>Guano de corral (saco 50 kg)</text:p>
          </table:table-cell>
          <table:table-cell table:style-name="ce403" table:formula="of:=+[$'TERREN Y OBR CIV'.F31]" office:value-type="float" office:value="2000" calcext:value-type="float">
            <text:p>2000.00</text:p>
          </table:table-cell>
          <table:table-cell table:style-name="ce413" table:formula="of:=+[.B36]" office:value-type="float" office:value="2000" calcext:value-type="float">
            <text:p>2,000.00</text:p>
          </table:table-cell>
          <table:table-cell table:style-name="ce413"/>
          <table:table-cell table:number-columns-repeated="3"/>
          <table:table-cell table:style-name="ce432" table:formula="of:=+[$'TERREN Y OBR CIV'.B31]" office:value-type="string" office:string-value="Guano de corral (saco 50 kg)" calcext:value-type="string">
            <text:p>Guano de corral (saco 50 kg)</text:p>
          </table:table-cell>
          <table:table-cell table:style-name="ce439" table:formula="of:=+[$'TERREN Y OBR CIV'.C31]" office:value-type="string" office:string-value="sac" calcext:value-type="string">
            <text:p>sac</text:p>
          </table:table-cell>
          <table:table-cell table:style-name="ce439" table:formula="of:=+[$'TERREN Y OBR CIV'.D31]" office:value-type="float" office:value="200" calcext:value-type="float">
            <text:p>200</text:p>
          </table:table-cell>
          <table:table-cell table:style-name="ce447" table:formula="of:=+[.B36]" office:value-type="float" office:value="2000" calcext:value-type="float">
            <text:p>2,000.00</text:p>
          </table:table-cell>
          <table:table-cell table:style-name="ce450"/>
          <table:table-cell table:style-name="ce464"/>
          <table:table-cell table:style-name="ce468" table:formula="of:=+[.K36]" office:value-type="float" office:value="2000" calcext:value-type="float">
            <text:p>2,000.00</text:p>
          </table:table-cell>
          <table:table-cell table:style-name="ce462" table:formula="of:=IF(SUM([.M36:.N36])&gt;0;SUM([.M36:.N36]);&quot;&quot;)" office:value-type="float" office:value="2000" calcext:value-type="float">
            <text:p>2,000.00</text:p>
          </table:table-cell>
          <table:table-cell table:number-columns-repeated="16369"/>
        </table:table-row>
        <table:table-row table:style-name="ro1">
          <table:table-cell table:style-name="ce394" table:formula="of:=+[$'TERREN Y OBR CIV'.B32]" office:value-type="string" office:string-value="Guano de isla" calcext:value-type="string">
            <text:p>Guano de isla</text:p>
          </table:table-cell>
          <table:table-cell table:style-name="ce403" table:formula="of:=+[$'TERREN Y OBR CIV'.F32]" office:value-type="float" office:value="1705" calcext:value-type="float">
            <text:p>1705.00</text:p>
          </table:table-cell>
          <table:table-cell table:style-name="ce413"/>
          <table:table-cell table:style-name="ce413" table:formula="of:=+[.B37]" office:value-type="float" office:value="1705" calcext:value-type="float">
            <text:p>1,705.00</text:p>
          </table:table-cell>
          <table:table-cell table:number-columns-repeated="3"/>
          <table:table-cell table:style-name="ce432" table:formula="of:=+[$'TERREN Y OBR CIV'.B32]" office:value-type="string" office:string-value="Guano de isla" calcext:value-type="string">
            <text:p>Guano de isla</text:p>
          </table:table-cell>
          <table:table-cell table:style-name="ce439" table:formula="of:=+[$'TERREN Y OBR CIV'.C32]" office:value-type="string" office:string-value="sac" calcext:value-type="string">
            <text:p>sac</text:p>
          </table:table-cell>
          <table:table-cell table:style-name="ce439" table:formula="of:=+[$'TERREN Y OBR CIV'.D32]" office:value-type="float" office:value="31" calcext:value-type="float">
            <text:p>31</text:p>
          </table:table-cell>
          <table:table-cell table:style-name="ce447" table:formula="of:=+[.B37]" office:value-type="float" office:value="1705" calcext:value-type="float">
            <text:p>1,705.00</text:p>
          </table:table-cell>
          <table:table-cell table:style-name="ce450" table:formula="of:=+[.K37]" office:value-type="float" office:value="1705" calcext:value-type="float">
            <text:p>1,705.00</text:p>
          </table:table-cell>
          <table:table-cell table:style-name="ce464"/>
          <table:table-cell table:style-name="ce468"/>
          <table:table-cell table:style-name="ce462" table:formula="of:=IF(SUM([.M37:.N37])&gt;0;SUM([.M37:.N37]);&quot;&quot;)">
            <text:p/>
          </table:table-cell>
          <table:table-cell table:number-columns-repeated="16369"/>
        </table:table-row>
        <table:table-row table:style-name="ro1">
          <table:table-cell table:style-name="ce394" table:formula="of:=+[$'TERREN Y OBR CIV'.B33]" office:value-type="string" office:string-value="Inoculante ( sobre de 100 gr)" calcext:value-type="string">
            <text:p>Inoculante ( sobre de 100 gr)</text:p>
          </table:table-cell>
          <table:table-cell table:style-name="ce403" table:formula="of:=+[$'TERREN Y OBR CIV'.F33]" office:value-type="float" office:value="345" calcext:value-type="float">
            <text:p>345.00</text:p>
          </table:table-cell>
          <table:table-cell table:style-name="ce413"/>
          <table:table-cell table:style-name="ce413" table:formula="of:=+[.B38]" office:value-type="float" office:value="345" calcext:value-type="float">
            <text:p>345.00</text:p>
          </table:table-cell>
          <table:table-cell table:number-columns-repeated="3"/>
          <table:table-cell table:style-name="ce432" table:formula="of:=+[$'TERREN Y OBR CIV'.B33]" office:value-type="string" office:string-value="Inoculante ( sobre de 100 gr)" calcext:value-type="string">
            <text:p>Inoculante ( sobre de 100 gr)</text:p>
          </table:table-cell>
          <table:table-cell table:style-name="ce439" table:formula="of:=+[$'TERREN Y OBR CIV'.C33]" office:value-type="string" office:string-value="sbr" calcext:value-type="string">
            <text:p>sbr</text:p>
          </table:table-cell>
          <table:table-cell table:style-name="ce439" table:formula="of:=+[$'TERREN Y OBR CIV'.D33]" office:value-type="float" office:value="15" calcext:value-type="float">
            <text:p>15</text:p>
          </table:table-cell>
          <table:table-cell table:style-name="ce447" table:formula="of:=+[.B38]" office:value-type="float" office:value="345" calcext:value-type="float">
            <text:p>345.00</text:p>
          </table:table-cell>
          <table:table-cell table:style-name="ce450" table:formula="of:=+[.K38]" office:value-type="float" office:value="345" calcext:value-type="float">
            <text:p>345.00</text:p>
          </table:table-cell>
          <table:table-cell table:style-name="ce464"/>
          <table:table-cell table:style-name="ce468"/>
          <table:table-cell table:style-name="ce462" table:formula="of:=IF(SUM([.M38:.N38])&gt;0;SUM([.M38:.N38]);&quot;&quot;)">
            <text:p/>
          </table:table-cell>
          <table:table-cell table:number-columns-repeated="16369"/>
        </table:table-row>
        <table:table-row table:style-name="ro1">
          <table:table-cell table:style-name="ce394" table:formula="of:=+[$'TERREN Y OBR CIV'.B34]" office:value-type="string" office:string-value="Alimento concentrado (saco 40 kg)" calcext:value-type="string">
            <text:p>Alimento concentrado (saco 40 kg)</text:p>
          </table:table-cell>
          <table:table-cell table:style-name="ce403" table:formula="of:=+[$'TERREN Y OBR CIV'.F34]" office:value-type="float" office:value="9672" calcext:value-type="float">
            <text:p>9672.00</text:p>
          </table:table-cell>
          <table:table-cell table:style-name="ce413"/>
          <table:table-cell table:style-name="ce413" table:formula="of:=+[.B39]" office:value-type="float" office:value="9672" calcext:value-type="float">
            <text:p>9,672.00</text:p>
          </table:table-cell>
          <table:table-cell table:number-columns-repeated="3"/>
          <table:table-cell table:style-name="ce432" table:formula="of:=+[$'TERREN Y OBR CIV'.B34]" office:value-type="string" office:string-value="Alimento concentrado (saco 40 kg)" calcext:value-type="string">
            <text:p>Alimento concentrado (saco 40 kg)</text:p>
          </table:table-cell>
          <table:table-cell table:style-name="ce439" table:formula="of:=+[$'TERREN Y OBR CIV'.C34]" office:value-type="string" office:string-value="sac" calcext:value-type="string">
            <text:p>sac</text:p>
          </table:table-cell>
          <table:table-cell table:style-name="ce439" table:formula="of:=+[$'TERREN Y OBR CIV'.D34]" office:value-type="float" office:value="124" calcext:value-type="float">
            <text:p>124</text:p>
          </table:table-cell>
          <table:table-cell table:style-name="ce447" table:formula="of:=+[.B39]" office:value-type="float" office:value="9672" calcext:value-type="float">
            <text:p>9,672.00</text:p>
          </table:table-cell>
          <table:table-cell table:style-name="ce450" table:formula="of:=+[.K39]" office:value-type="float" office:value="9672" calcext:value-type="float">
            <text:p>9,672.00</text:p>
          </table:table-cell>
          <table:table-cell table:style-name="ce464"/>
          <table:table-cell table:style-name="ce468"/>
          <table:table-cell table:style-name="ce462" table:formula="of:=IF(SUM([.M39:.N39])&gt;0;SUM([.M39:.N39]);&quot;&quot;)">
            <text:p/>
          </table:table-cell>
          <table:table-cell table:number-columns-repeated="16369"/>
        </table:table-row>
        <table:table-row table:style-name="ro1">
          <table:table-cell table:style-name="ce394" table:formula="of:=+[$'TERREN Y OBR CIV'.B35]" office:value-type="string" office:string-value="Semilla de cebada para FVH" calcext:value-type="string">
            <text:p>Semilla de cebada para FVH</text:p>
          </table:table-cell>
          <table:table-cell table:style-name="ce403" table:formula="of:=+[$'TERREN Y OBR CIV'.F35]" office:value-type="float" office:value="460" calcext:value-type="float">
            <text:p>460.00</text:p>
          </table:table-cell>
          <table:table-cell table:style-name="ce413" table:formula="of:=+[.B40]" office:value-type="float" office:value="460" calcext:value-type="float">
            <text:p>460.00</text:p>
          </table:table-cell>
          <table:table-cell table:style-name="ce413"/>
          <table:table-cell table:number-columns-repeated="3"/>
          <table:table-cell table:style-name="ce432" table:formula="of:=+[$'TERREN Y OBR CIV'.B35]" office:value-type="string" office:string-value="Semilla de cebada para FVH" calcext:value-type="string">
            <text:p>Semilla de cebada para FVH</text:p>
          </table:table-cell>
          <table:table-cell table:style-name="ce439" table:formula="of:=+[$'TERREN Y OBR CIV'.C35]" office:value-type="string" office:string-value="kg" calcext:value-type="string">
            <text:p>kg</text:p>
          </table:table-cell>
          <table:table-cell table:style-name="ce439" table:formula="of:=+[$'TERREN Y OBR CIV'.D35]" office:value-type="float" office:value="200" calcext:value-type="float">
            <text:p>200</text:p>
          </table:table-cell>
          <table:table-cell table:style-name="ce447" table:formula="of:=+[.B40]" office:value-type="float" office:value="460" calcext:value-type="float">
            <text:p>460.00</text:p>
          </table:table-cell>
          <table:table-cell table:style-name="ce450"/>
          <table:table-cell table:style-name="ce464"/>
          <table:table-cell table:style-name="ce468" table:formula="of:=+[.K40]" office:value-type="float" office:value="460" calcext:value-type="float">
            <text:p>460.00</text:p>
          </table:table-cell>
          <table:table-cell table:style-name="ce462" table:formula="of:=IF(SUM([.M40:.N40])&gt;0;SUM([.M40:.N40]);&quot;&quot;)" office:value-type="float" office:value="460" calcext:value-type="float">
            <text:p>460.00</text:p>
          </table:table-cell>
          <table:table-cell table:number-columns-repeated="16369"/>
        </table:table-row>
        <table:table-row table:style-name="ro1">
          <table:table-cell table:style-name="ce392" office:value-type="string" calcext:value-type="string">
            <text:p>I.1.2.MAQUINARIA Y EQUIPOS </text:p>
          </table:table-cell>
          <table:table-cell table:style-name="ce401" table:formula="of:=[.B42]+[.B44]" office:value-type="float" office:value="30408" calcext:value-type="float">
            <text:p>30408.00</text:p>
          </table:table-cell>
          <table:table-cell table:style-name="ce411" table:formula="of:=[.C42]" office:value-type="float" office:value="0" calcext:value-type="float">
            <text:p>0.00</text:p>
          </table:table-cell>
          <table:table-cell table:style-name="ce411" table:formula="of:=[.D42]+[.D44]" office:value-type="float" office:value="30408" calcext:value-type="float">
            <text:p>30,408.00</text:p>
          </table:table-cell>
          <table:table-cell table:style-name="ce339"/>
          <table:table-cell table:number-columns-repeated="2"/>
          <table:table-cell table:style-name="ce430" table:formula="of:=+[.A41]" office:value-type="string" office:string-value="I.1.2.MAQUINARIA Y EQUIPOS " calcext:value-type="string">
            <text:p>I.1.2.MAQUINARIA Y EQUIPOS </text:p>
          </table:table-cell>
          <table:table-cell table:style-name="ce430" table:number-columns-repeated="2"/>
          <table:table-cell table:style-name="ce445" table:formula="of:=[.K42]+[.K44]" office:value-type="float" office:value="30408" calcext:value-type="float">
            <text:p>30,408.00</text:p>
          </table:table-cell>
          <table:table-cell table:style-name="ce445" table:formula="of:=[.L42]+[.L44]" office:value-type="float" office:value="30408" calcext:value-type="float">
            <text:p>30,408.00</text:p>
          </table:table-cell>
          <table:table-cell table:style-name="ce445" table:formula="of:=[.M42]+[.M44]" office:value-type="float" office:value="0" calcext:value-type="float">
            <text:p>0.00</text:p>
          </table:table-cell>
          <table:table-cell table:style-name="ce445" table:formula="of:=[.N42]+[.N44]" office:value-type="float" office:value="0" calcext:value-type="float">
            <text:p>0.00</text:p>
          </table:table-cell>
          <table:table-cell table:style-name="ce445" table:formula="of:=[.O42]+[.O44]" office:value-type="float" office:value="0" calcext:value-type="float">
            <text:p>0.00</text:p>
          </table:table-cell>
          <table:table-cell table:number-columns-repeated="16369"/>
        </table:table-row>
        <table:table-row table:style-name="ro1">
          <table:table-cell table:style-name="ce393" office:value-type="string" calcext:value-type="string">
            <text:p>Maquinaria y equipo</text:p>
          </table:table-cell>
          <table:table-cell table:style-name="ce404" table:formula="of:=SUM([.B43:.B43])" office:value-type="float" office:value="750" calcext:value-type="float">
            <text:p>750.00</text:p>
          </table:table-cell>
          <table:table-cell table:style-name="ce411" table:formula="of:=SUM([.C43:.C48])" office:value-type="float" office:value="0" calcext:value-type="float">
            <text:p>0.00</text:p>
          </table:table-cell>
          <table:table-cell table:style-name="ce414" table:formula="of:=SUM([.D43:.D43])" office:value-type="float" office:value="750" calcext:value-type="float">
            <text:p>750.00</text:p>
          </table:table-cell>
          <table:table-cell table:style-name="ce339"/>
          <table:table-cell table:style-name="ce427"/>
          <table:table-cell/>
          <table:table-cell table:style-name="ce431" table:formula="of:=+[.A42]" office:value-type="string" office:string-value="Maquinaria y equipo" calcext:value-type="string">
            <text:p>Maquinaria y equipo</text:p>
          </table:table-cell>
          <table:table-cell table:style-name="ce431" table:number-columns-repeated="2"/>
          <table:table-cell table:style-name="ce448" table:formula="of:=SUM([.K43:.K43])" office:value-type="float" office:value="750" calcext:value-type="float">
            <text:p>750.00</text:p>
          </table:table-cell>
          <table:table-cell table:style-name="ce448" table:formula="of:=SUM([.L43:.L43])" office:value-type="float" office:value="750" calcext:value-type="float">
            <text:p>750.00</text:p>
          </table:table-cell>
          <table:table-cell table:style-name="ce448" table:formula="of:=SUM([.M43:.M43])" office:value-type="float" office:value="0" calcext:value-type="float">
            <text:p>0.00</text:p>
          </table:table-cell>
          <table:table-cell table:style-name="ce448" table:formula="of:=SUM([.N43:.N43])" office:value-type="float" office:value="0" calcext:value-type="float">
            <text:p>0.00</text:p>
          </table:table-cell>
          <table:table-cell table:style-name="ce448" table:formula="of:=SUM([.O43:.O43])" office:value-type="float" office:value="0" calcext:value-type="float">
            <text:p>0.00</text:p>
          </table:table-cell>
          <table:table-cell table:number-columns-repeated="16369"/>
        </table:table-row>
        <table:table-row table:style-name="ro1">
          <table:table-cell table:style-name="ce394" table:formula="of:=+[$'MUEB, MAQ,EQUIP'.B5]" office:value-type="string" office:string-value="Herramientas Manuales" calcext:value-type="string">
            <text:p>Herramientas Manuales</text:p>
          </table:table-cell>
          <table:table-cell table:style-name="ce405" table:formula="of:=+[$'MUEB, MAQ,EQUIP'.F5]" office:value-type="float" office:value="750" calcext:value-type="float">
            <text:p>750.00</text:p>
          </table:table-cell>
          <table:table-cell table:style-name="ce413"/>
          <table:table-cell table:style-name="ce413" table:formula="of:=[.B43]" office:value-type="float" office:value="750" calcext:value-type="float">
            <text:p>750.00</text:p>
          </table:table-cell>
          <table:table-cell table:style-name="ce339"/>
          <table:table-cell table:number-columns-repeated="2"/>
          <table:table-cell table:style-name="ce432" table:formula="of:=+[$'MUEB, MAQ,EQUIP'.B5]" office:value-type="string" office:string-value="Herramientas Manuales" calcext:value-type="string">
            <text:p>Herramientas Manuales</text:p>
          </table:table-cell>
          <table:table-cell table:style-name="ce439" table:formula="of:=+[$'MUEB, MAQ,EQUIP'.C5]" office:value-type="string" office:string-value="Gbl" calcext:value-type="string">
            <text:p>Gbl</text:p>
          </table:table-cell>
          <table:table-cell table:style-name="ce439" table:formula="of:=+[$'MUEB, MAQ,EQUIP'.D5]" office:value-type="float" office:value="1" calcext:value-type="float">
            <text:p>1</text:p>
          </table:table-cell>
          <table:table-cell table:style-name="ce449" table:formula="of:=+[.B43]" office:value-type="float" office:value="750" calcext:value-type="float">
            <text:p>750.00</text:p>
          </table:table-cell>
          <table:table-cell table:style-name="ce450" table:formula="of:=[.K43]" office:value-type="float" office:value="750" calcext:value-type="float">
            <text:p>750.00</text:p>
          </table:table-cell>
          <table:table-cell table:style-name="ce464"/>
          <table:table-cell table:style-name="ce468"/>
          <table:table-cell table:style-name="ce462" table:formula="of:=IF(SUM([.M43:.N43])&gt;0;SUM([.M43:.N43]);&quot;&quot;)">
            <text:p/>
          </table:table-cell>
          <table:table-cell table:number-columns-repeated="16369"/>
        </table:table-row>
        <table:table-row table:style-name="ro1">
          <table:table-cell table:style-name="ce393" table:formula="of:=+[$'MUEB, MAQ,EQUIP'.B6]" office:value-type="string" office:string-value="EQUIPOS" calcext:value-type="string">
            <text:p>EQUIPOS</text:p>
          </table:table-cell>
          <table:table-cell table:style-name="ce404" table:formula="of:=SUM([.B45:.B54])" office:value-type="float" office:value="29658" calcext:value-type="float">
            <text:p>29658.00</text:p>
          </table:table-cell>
          <table:table-cell table:style-name="ce415"/>
          <table:table-cell table:style-name="ce414" table:formula="of:=SUM([.D45:.D54])" office:value-type="float" office:value="29658" calcext:value-type="float">
            <text:p>29,658.00</text:p>
          </table:table-cell>
          <table:table-cell table:style-name="ce344"/>
          <table:table-cell table:style-name="ce360" table:number-columns-repeated="2"/>
          <table:table-cell table:style-name="ce431" table:formula="of:=+[.A44]" office:value-type="string" office:string-value="EQUIPOS" calcext:value-type="string">
            <text:p>EQUIPOS</text:p>
          </table:table-cell>
          <table:table-cell table:style-name="ce431" table:number-columns-repeated="2"/>
          <table:table-cell table:style-name="ce448" table:formula="of:=SUM([.K45:.K54])" office:value-type="float" office:value="29658" calcext:value-type="float">
            <text:p>29,658.00</text:p>
          </table:table-cell>
          <table:table-cell table:style-name="ce448" table:formula="of:=SUM([.L45:.L54])" office:value-type="float" office:value="29658" calcext:value-type="float">
            <text:p>29,658.00</text:p>
          </table:table-cell>
          <table:table-cell table:style-name="ce448" table:formula="of:=SUM([.M45:.M52])" office:value-type="float" office:value="0" calcext:value-type="float">
            <text:p>0.00</text:p>
          </table:table-cell>
          <table:table-cell table:style-name="ce448" table:formula="of:=SUM([.N45:.N52])" office:value-type="float" office:value="0" calcext:value-type="float">
            <text:p>0.00</text:p>
          </table:table-cell>
          <table:table-cell table:style-name="ce448" table:formula="of:=SUM([.O45:.O52])" office:value-type="float" office:value="0" calcext:value-type="float">
            <text:p>0.00</text:p>
          </table:table-cell>
          <table:table-cell table:style-name="ce360" table:number-columns-repeated="16369"/>
        </table:table-row>
        <table:table-row table:style-name="ro1">
          <table:table-cell table:style-name="ce394" table:formula="of:=+[$'MUEB, MAQ,EQUIP'.B7]" office:value-type="string" office:string-value="Jabas Plasticas  para manejo  35*52*36" calcext:value-type="string">
            <text:p>Jabas Plasticas <text:s/>para manejo <text:s/>35*52*36</text:p>
          </table:table-cell>
          <table:table-cell table:style-name="ce405" table:formula="of:=+[$'MUEB, MAQ,EQUIP'.F7]" office:value-type="float" office:value="1440" calcext:value-type="float">
            <text:p>1440.00</text:p>
          </table:table-cell>
          <table:table-cell table:style-name="ce413"/>
          <table:table-cell table:style-name="ce413" table:formula="of:=[.B45]" office:value-type="float" office:value="1440" calcext:value-type="float">
            <text:p>1,440.00</text:p>
          </table:table-cell>
          <table:table-cell table:style-name="ce339"/>
          <table:table-cell table:number-columns-repeated="2"/>
          <table:table-cell table:style-name="ce432" table:formula="of:=+[$'MUEB, MAQ,EQUIP'.B7]" office:value-type="string" office:string-value="Jabas Plasticas  para manejo  35*52*36" calcext:value-type="string">
            <text:p>Jabas Plasticas <text:s/>para manejo <text:s/>35*52*36</text:p>
          </table:table-cell>
          <table:table-cell table:style-name="ce439" table:formula="of:=+[$'MUEB, MAQ,EQUIP'.C7]" office:value-type="string" office:string-value="und" calcext:value-type="string">
            <text:p>und</text:p>
          </table:table-cell>
          <table:table-cell table:style-name="ce439" table:formula="of:=+[$'MUEB, MAQ,EQUIP'.D7]" office:value-type="float" office:value="80" calcext:value-type="float">
            <text:p>80</text:p>
          </table:table-cell>
          <table:table-cell table:style-name="ce449" table:formula="of:=+[.B45]" office:value-type="float" office:value="1440" calcext:value-type="float">
            <text:p>1,440.00</text:p>
          </table:table-cell>
          <table:table-cell table:style-name="ce450" table:formula="of:=[.K45]" office:value-type="float" office:value="1440" calcext:value-type="float">
            <text:p>1,440.00</text:p>
          </table:table-cell>
          <table:table-cell table:style-name="ce464"/>
          <table:table-cell table:style-name="ce468"/>
          <table:table-cell table:style-name="ce462" table:formula="of:=IF(SUM([.M45:.N45])&gt;0;SUM([.M45:.N45]);&quot;&quot;)">
            <text:p/>
          </table:table-cell>
          <table:table-cell table:number-columns-repeated="16369"/>
        </table:table-row>
        <table:table-row table:style-name="ro1">
          <table:table-cell table:style-name="ce394" table:formula="of:=+[$'MUEB, MAQ,EQUIP'.B8]" office:value-type="string" office:string-value="Gazaperas galv. para cuyes 38 cm diam 21 cm de altura" calcext:value-type="string">
            <text:p>Gazaperas galv. para cuyes 38 cm diam 21 cm de altura</text:p>
          </table:table-cell>
          <table:table-cell table:style-name="ce405" table:formula="of:=+[$'MUEB, MAQ,EQUIP'.F8]" office:value-type="float" office:value="2640" calcext:value-type="float">
            <text:p>2640.00</text:p>
          </table:table-cell>
          <table:table-cell table:style-name="ce413"/>
          <table:table-cell table:style-name="ce413" table:formula="of:=[.B46]" office:value-type="float" office:value="2640" calcext:value-type="float">
            <text:p>2,640.00</text:p>
          </table:table-cell>
          <table:table-cell table:style-name="ce339"/>
          <table:table-cell table:number-columns-repeated="2"/>
          <table:table-cell table:style-name="ce432" table:formula="of:=+[$'MUEB, MAQ,EQUIP'.B8]" office:value-type="string" office:string-value="Gazaperas galv. para cuyes 38 cm diam 21 cm de altura" calcext:value-type="string">
            <text:p>Gazaperas galv. para cuyes 38 cm diam 21 cm de altura</text:p>
          </table:table-cell>
          <table:table-cell table:style-name="ce439" table:formula="of:=+[$'MUEB, MAQ,EQUIP'.C8]" office:value-type="string" office:string-value="und" calcext:value-type="string">
            <text:p>und</text:p>
          </table:table-cell>
          <table:table-cell table:style-name="ce439" table:formula="of:=+[$'MUEB, MAQ,EQUIP'.D8]" office:value-type="float" office:value="176" calcext:value-type="float">
            <text:p>176</text:p>
          </table:table-cell>
          <table:table-cell table:style-name="ce449" table:formula="of:=+[.B46]" office:value-type="float" office:value="2640" calcext:value-type="float">
            <text:p>2,640.00</text:p>
          </table:table-cell>
          <table:table-cell table:style-name="ce450" table:formula="of:=[.K46]" office:value-type="float" office:value="2640" calcext:value-type="float">
            <text:p>2,640.00</text:p>
          </table:table-cell>
          <table:table-cell table:style-name="ce464"/>
          <table:table-cell table:style-name="ce468"/>
          <table:table-cell table:style-name="ce462" table:formula="of:=IF(SUM([.M46:.N46])&gt;0;SUM([.M46:.N46]);&quot;&quot;)">
            <text:p/>
          </table:table-cell>
          <table:table-cell table:number-columns-repeated="16369"/>
        </table:table-row>
        <table:table-row table:style-name="ro1">
          <table:table-cell table:style-name="ce394" table:formula="of:=+[$'MUEB, MAQ,EQUIP'.B9]" office:value-type="string" office:string-value="Comederos de  tipo tolva de aluminio cap.6 kg" calcext:value-type="string">
            <text:p>Comederos de <text:s/>tipo tolva de aluminio cap.6 kg</text:p>
          </table:table-cell>
          <table:table-cell table:style-name="ce405" table:formula="of:=+[$'MUEB, MAQ,EQUIP'.F9]" office:value-type="float" office:value="2464" calcext:value-type="float">
            <text:p>2464.00</text:p>
          </table:table-cell>
          <table:table-cell table:style-name="ce413"/>
          <table:table-cell table:style-name="ce413" table:formula="of:=[.B47]" office:value-type="float" office:value="2464" calcext:value-type="float">
            <text:p>2,464.00</text:p>
          </table:table-cell>
          <table:table-cell table:style-name="ce339"/>
          <table:table-cell table:number-columns-repeated="2"/>
          <table:table-cell table:style-name="ce432" table:formula="of:=+[$'MUEB, MAQ,EQUIP'.B9]" office:value-type="string" office:string-value="Comederos de  tipo tolva de aluminio cap.6 kg" calcext:value-type="string">
            <text:p>Comederos de <text:s/>tipo tolva de aluminio cap.6 kg</text:p>
          </table:table-cell>
          <table:table-cell table:style-name="ce439" table:formula="of:=+[$'MUEB, MAQ,EQUIP'.C9]" office:value-type="string" office:string-value="und" calcext:value-type="string">
            <text:p>und</text:p>
          </table:table-cell>
          <table:table-cell table:style-name="ce439" table:formula="of:=+[$'MUEB, MAQ,EQUIP'.D9]" office:value-type="float" office:value="176" calcext:value-type="float">
            <text:p>176</text:p>
          </table:table-cell>
          <table:table-cell table:style-name="ce449" table:formula="of:=+[.B47]" office:value-type="float" office:value="2464" calcext:value-type="float">
            <text:p>2,464.00</text:p>
          </table:table-cell>
          <table:table-cell table:style-name="ce450" table:formula="of:=[.K47]" office:value-type="float" office:value="2464" calcext:value-type="float">
            <text:p>2,464.00</text:p>
          </table:table-cell>
          <table:table-cell table:style-name="ce464"/>
          <table:table-cell table:style-name="ce468"/>
          <table:table-cell table:style-name="ce462" table:formula="of:=IF(SUM([.M47:.N47])&gt;0;SUM([.M47:.N47]);&quot;&quot;)">
            <text:p/>
          </table:table-cell>
          <table:table-cell table:number-columns-repeated="16369"/>
        </table:table-row>
        <table:table-row table:style-name="ro1">
          <table:table-cell table:style-name="ce394" table:formula="of:=+[$'MUEB, MAQ,EQUIP'.B10]" office:value-type="string" office:string-value="Forrajera galvanizada " calcext:value-type="string">
            <text:p>Forrajera galvanizada </text:p>
          </table:table-cell>
          <table:table-cell table:style-name="ce405" table:formula="of:=+[$'MUEB, MAQ,EQUIP'.F10]" office:value-type="float" office:value="2640" calcext:value-type="float">
            <text:p>2640.00</text:p>
          </table:table-cell>
          <table:table-cell table:style-name="ce413"/>
          <table:table-cell table:style-name="ce413" table:formula="of:=[.B48]" office:value-type="float" office:value="2640" calcext:value-type="float">
            <text:p>2,640.00</text:p>
          </table:table-cell>
          <table:table-cell table:style-name="ce339"/>
          <table:table-cell table:number-columns-repeated="2"/>
          <table:table-cell table:style-name="ce432" table:formula="of:=+[$'MUEB, MAQ,EQUIP'.B10]" office:value-type="string" office:string-value="Forrajera galvanizada " calcext:value-type="string">
            <text:p>Forrajera galvanizada </text:p>
          </table:table-cell>
          <table:table-cell table:style-name="ce439" table:formula="of:=+[$'MUEB, MAQ,EQUIP'.C10]" office:value-type="string" office:string-value="und" calcext:value-type="string">
            <text:p>und</text:p>
          </table:table-cell>
          <table:table-cell table:style-name="ce439" table:formula="of:=+[$'MUEB, MAQ,EQUIP'.D10]" office:value-type="float" office:value="176" calcext:value-type="float">
            <text:p>176</text:p>
          </table:table-cell>
          <table:table-cell table:style-name="ce449" table:formula="of:=+[.B48]" office:value-type="float" office:value="2640" calcext:value-type="float">
            <text:p>2,640.00</text:p>
          </table:table-cell>
          <table:table-cell table:style-name="ce450" table:formula="of:=[.K48]" office:value-type="float" office:value="2640" calcext:value-type="float">
            <text:p>2,640.00</text:p>
          </table:table-cell>
          <table:table-cell table:style-name="ce464"/>
          <table:table-cell table:style-name="ce468"/>
          <table:table-cell table:style-name="ce462" table:formula="of:=IF(SUM([.M48:.N48])&gt;0;SUM([.M48:.N48]);&quot;&quot;)">
            <text:p/>
          </table:table-cell>
          <table:table-cell table:number-columns-repeated="16369"/>
        </table:table-row>
        <table:table-row table:style-name="ro1">
          <table:table-cell table:style-name="ce394" table:formula="of:=+[$'MUEB, MAQ,EQUIP'.B11]" office:value-type="string" office:string-value="Jabas de transporte 58*83*13 cm" calcext:value-type="string">
            <text:p>Jabas de transporte 58*83*13 cm</text:p>
          </table:table-cell>
          <table:table-cell table:style-name="ce405" table:formula="of:=+[$'MUEB, MAQ,EQUIP'.F11]" office:value-type="float" office:value="2800" calcext:value-type="float">
            <text:p>2800.00</text:p>
          </table:table-cell>
          <table:table-cell table:style-name="ce413"/>
          <table:table-cell table:style-name="ce413" table:formula="of:=[.B49]" office:value-type="float" office:value="2800" calcext:value-type="float">
            <text:p>2,800.00</text:p>
          </table:table-cell>
          <table:table-cell table:style-name="ce339"/>
          <table:table-cell table:number-columns-repeated="2"/>
          <table:table-cell table:style-name="ce432" table:formula="of:=+[$'MUEB, MAQ,EQUIP'.B11]" office:value-type="string" office:string-value="Jabas de transporte 58*83*13 cm" calcext:value-type="string">
            <text:p>Jabas de transporte 58*83*13 cm</text:p>
          </table:table-cell>
          <table:table-cell table:style-name="ce439" table:formula="of:=+[$'MUEB, MAQ,EQUIP'.C11]" office:value-type="string" office:string-value="und" calcext:value-type="string">
            <text:p>und</text:p>
          </table:table-cell>
          <table:table-cell table:style-name="ce439" table:formula="of:=+[$'MUEB, MAQ,EQUIP'.D11]" office:value-type="float" office:value="40" calcext:value-type="float">
            <text:p>40</text:p>
          </table:table-cell>
          <table:table-cell table:style-name="ce449" table:formula="of:=+[.B49]" office:value-type="float" office:value="2800" calcext:value-type="float">
            <text:p>2,800.00</text:p>
          </table:table-cell>
          <table:table-cell table:style-name="ce450" table:formula="of:=[.K49]" office:value-type="float" office:value="2800" calcext:value-type="float">
            <text:p>2,800.00</text:p>
          </table:table-cell>
          <table:table-cell table:style-name="ce464"/>
          <table:table-cell table:style-name="ce468"/>
          <table:table-cell table:style-name="ce462" table:formula="of:=IF(SUM([.M49:.N49])&gt;0;SUM([.M49:.N49]);&quot;&quot;)">
            <text:p/>
          </table:table-cell>
          <table:table-cell table:number-columns-repeated="16369"/>
        </table:table-row>
        <table:table-row table:style-name="ro1">
          <table:table-cell table:style-name="ce394" table:formula="of:=+[$'MUEB, MAQ,EQUIP'.B12]" office:value-type="string" office:string-value="Termometro ambiental con maximi y minimo " calcext:value-type="string">
            <text:p>Termometro ambiental con maximi y minimo </text:p>
          </table:table-cell>
          <table:table-cell table:style-name="ce405" table:formula="of:=+[$'MUEB, MAQ,EQUIP'.F12]" office:value-type="float" office:value="480" calcext:value-type="float">
            <text:p>480.00</text:p>
          </table:table-cell>
          <table:table-cell table:style-name="ce413"/>
          <table:table-cell table:style-name="ce413" table:formula="of:=[.B50]" office:value-type="float" office:value="480" calcext:value-type="float">
            <text:p>480.00</text:p>
          </table:table-cell>
          <table:table-cell table:style-name="ce339"/>
          <table:table-cell table:number-columns-repeated="2"/>
          <table:table-cell table:style-name="ce432" table:formula="of:=+[$'MUEB, MAQ,EQUIP'.B12]" office:value-type="string" office:string-value="Termometro ambiental con maximi y minimo " calcext:value-type="string">
            <text:p>Termometro ambiental con maximi y minimo </text:p>
          </table:table-cell>
          <table:table-cell table:style-name="ce439" table:formula="of:=+[$'MUEB, MAQ,EQUIP'.C12]" office:value-type="string" office:string-value="und" calcext:value-type="string">
            <text:p>und</text:p>
          </table:table-cell>
          <table:table-cell table:style-name="ce439" table:formula="of:=+[$'MUEB, MAQ,EQUIP'.D12]" office:value-type="float" office:value="8" calcext:value-type="float">
            <text:p>8</text:p>
          </table:table-cell>
          <table:table-cell table:style-name="ce449" table:formula="of:=+[.B50]" office:value-type="float" office:value="480" calcext:value-type="float">
            <text:p>480.00</text:p>
          </table:table-cell>
          <table:table-cell table:style-name="ce450" table:formula="of:=[.K50]" office:value-type="float" office:value="480" calcext:value-type="float">
            <text:p>480.00</text:p>
          </table:table-cell>
          <table:table-cell table:style-name="ce464"/>
          <table:table-cell table:style-name="ce468"/>
          <table:table-cell table:style-name="ce462" table:formula="of:=IF(SUM([.M50:.N50])&gt;0;SUM([.M50:.N50]);&quot;&quot;)">
            <text:p/>
          </table:table-cell>
          <table:table-cell table:number-columns-repeated="16369"/>
        </table:table-row>
        <table:table-row table:style-name="ro1">
          <table:table-cell table:style-name="ce394" table:formula="of:=+[$'MUEB, MAQ,EQUIP'.B13]" office:value-type="string" office:string-value="Balanza digital de 20 kg" calcext:value-type="string">
            <text:p>Balanza digital de 20 kg</text:p>
          </table:table-cell>
          <table:table-cell table:style-name="ce405" table:formula="of:=+[$'MUEB, MAQ,EQUIP'.F13]" office:value-type="float" office:value="1040" calcext:value-type="float">
            <text:p>1040.00</text:p>
          </table:table-cell>
          <table:table-cell table:style-name="ce413"/>
          <table:table-cell table:style-name="ce413" table:formula="of:=[.B51]" office:value-type="float" office:value="1040" calcext:value-type="float">
            <text:p>1,040.00</text:p>
          </table:table-cell>
          <table:table-cell table:style-name="ce339"/>
          <table:table-cell table:number-columns-repeated="2"/>
          <table:table-cell table:style-name="ce432" table:formula="of:=+[$'MUEB, MAQ,EQUIP'.B13]" office:value-type="string" office:string-value="Balanza digital de 20 kg" calcext:value-type="string">
            <text:p>Balanza digital de 20 kg</text:p>
          </table:table-cell>
          <table:table-cell table:style-name="ce439" table:formula="of:=+[$'MUEB, MAQ,EQUIP'.C13]" office:value-type="string" office:string-value="und" calcext:value-type="string">
            <text:p>und</text:p>
          </table:table-cell>
          <table:table-cell table:style-name="ce439" table:formula="of:=+[$'MUEB, MAQ,EQUIP'.D13]" office:value-type="float" office:value="8" calcext:value-type="float">
            <text:p>8</text:p>
          </table:table-cell>
          <table:table-cell table:style-name="ce449" table:formula="of:=+[.B51]" office:value-type="float" office:value="1040" calcext:value-type="float">
            <text:p>1,040.00</text:p>
          </table:table-cell>
          <table:table-cell table:style-name="ce450" table:formula="of:=[.K51]" office:value-type="float" office:value="1040" calcext:value-type="float">
            <text:p>1,040.00</text:p>
          </table:table-cell>
          <table:table-cell table:style-name="ce464"/>
          <table:table-cell table:style-name="ce468"/>
          <table:table-cell table:style-name="ce462" table:formula="of:=IF(SUM([.M51:.N51])&gt;0;SUM([.M51:.N51]);&quot;&quot;)">
            <text:p/>
          </table:table-cell>
          <table:table-cell table:number-columns-repeated="16369"/>
        </table:table-row>
        <table:table-row table:style-name="ro1">
          <table:table-cell table:style-name="ce394" table:formula="of:=+[$'MUEB, MAQ,EQUIP'.B14]" office:value-type="string" office:string-value="Bandeja pregerminadora de plastica 50x36x4cm" calcext:value-type="string">
            <text:p>Bandeja pregerminadora de plastica 50x36x4cm</text:p>
          </table:table-cell>
          <table:table-cell table:style-name="ce405" table:formula="of:=+[$'MUEB, MAQ,EQUIP'.F14]" office:value-type="float" office:value="800" calcext:value-type="float">
            <text:p>800.00</text:p>
          </table:table-cell>
          <table:table-cell table:style-name="ce413"/>
          <table:table-cell table:style-name="ce413" table:formula="of:=[.B52]" office:value-type="float" office:value="800" calcext:value-type="float">
            <text:p>800.00</text:p>
          </table:table-cell>
          <table:table-cell table:style-name="ce339"/>
          <table:table-cell table:number-columns-repeated="2"/>
          <table:table-cell table:style-name="ce432" table:formula="of:=+[$'MUEB, MAQ,EQUIP'.B14]" office:value-type="string" office:string-value="Bandeja pregerminadora de plastica 50x36x4cm" calcext:value-type="string">
            <text:p>Bandeja pregerminadora de plastica 50x36x4cm</text:p>
          </table:table-cell>
          <table:table-cell table:style-name="ce439" table:formula="of:=+[$'MUEB, MAQ,EQUIP'.C14]" office:value-type="string" office:string-value="und" calcext:value-type="string">
            <text:p>und</text:p>
          </table:table-cell>
          <table:table-cell table:style-name="ce439" table:formula="of:=+[$'MUEB, MAQ,EQUIP'.D14]" office:value-type="float" office:value="80" calcext:value-type="float">
            <text:p>80</text:p>
          </table:table-cell>
          <table:table-cell table:style-name="ce449" table:formula="of:=+[.B52]" office:value-type="float" office:value="800" calcext:value-type="float">
            <text:p>800.00</text:p>
          </table:table-cell>
          <table:table-cell table:style-name="ce450" table:formula="of:=[.K52]" office:value-type="float" office:value="800" calcext:value-type="float">
            <text:p>800.00</text:p>
          </table:table-cell>
          <table:table-cell table:style-name="ce464"/>
          <table:table-cell table:style-name="ce468"/>
          <table:table-cell table:style-name="ce462" table:formula="of:=IF(SUM([.M52:.N52])&gt;0;SUM([.M52:.N52]);&quot;&quot;)">
            <text:p/>
          </table:table-cell>
          <table:table-cell table:number-columns-repeated="16369"/>
        </table:table-row>
        <table:table-row table:style-name="ro1">
          <table:table-cell table:style-name="ce394" table:formula="of:=+[$'MUEB, MAQ,EQUIP'.B15]" office:value-type="string" office:string-value="Motocarga" calcext:value-type="string">
            <text:p>Motocarga</text:p>
          </table:table-cell>
          <table:table-cell table:style-name="ce405" table:formula="of:=+[$'MUEB, MAQ,EQUIP'.F15]" office:value-type="float" office:value="11200" calcext:value-type="float">
            <text:p>11200.00</text:p>
          </table:table-cell>
          <table:table-cell table:style-name="ce413"/>
          <table:table-cell table:style-name="ce413" table:formula="of:=[.B53]" office:value-type="float" office:value="11200" calcext:value-type="float">
            <text:p>11,200.00</text:p>
          </table:table-cell>
          <table:table-cell table:style-name="ce339"/>
          <table:table-cell table:number-columns-repeated="2"/>
          <table:table-cell table:style-name="ce432" table:formula="of:=+[.A53]" office:value-type="string" office:string-value="Motocarga" calcext:value-type="string">
            <text:p>Motocarga</text:p>
          </table:table-cell>
          <table:table-cell table:style-name="ce439" office:value-type="string" calcext:value-type="string">
            <text:p>und</text:p>
          </table:table-cell>
          <table:table-cell table:style-name="ce439" office:value-type="float" office:value="1" calcext:value-type="float">
            <text:p>1</text:p>
          </table:table-cell>
          <table:table-cell table:style-name="ce449" table:formula="of:=+[.B53]" office:value-type="float" office:value="11200" calcext:value-type="float">
            <text:p>11,200.00</text:p>
          </table:table-cell>
          <table:table-cell table:style-name="ce450" table:formula="of:=[.K53]" office:value-type="float" office:value="11200" calcext:value-type="float">
            <text:p>11,200.00</text:p>
          </table:table-cell>
          <table:table-cell table:style-name="ce464"/>
          <table:table-cell table:style-name="ce468"/>
          <table:table-cell table:style-name="ce462"/>
          <table:table-cell table:number-columns-repeated="16369"/>
        </table:table-row>
        <table:table-row table:style-name="ro1">
          <table:table-cell table:style-name="ce394" office:value-type="string" calcext:value-type="string">
            <text:p>Kit Veterinario</text:p>
          </table:table-cell>
          <table:table-cell table:style-name="ce405" table:formula="of:=+[$'MUEB, MAQ,EQUIP'.F52]" office:value-type="float" office:value="4154" calcext:value-type="float">
            <text:p>4154.00</text:p>
          </table:table-cell>
          <table:table-cell table:style-name="ce413"/>
          <table:table-cell table:style-name="ce413" table:formula="of:=[.B54]" office:value-type="float" office:value="4154" calcext:value-type="float">
            <text:p>4,154.00</text:p>
          </table:table-cell>
          <table:table-cell table:style-name="ce339"/>
          <table:table-cell table:number-columns-repeated="2"/>
          <table:table-cell table:style-name="ce432" table:formula="of:=+[.A54]" office:value-type="string" office:string-value="Kit Veterinario" calcext:value-type="string">
            <text:p>Kit Veterinario</text:p>
          </table:table-cell>
          <table:table-cell table:style-name="ce439" office:value-type="string" calcext:value-type="string">
            <text:p>und</text:p>
          </table:table-cell>
          <table:table-cell table:style-name="ce439" office:value-type="float" office:value="31" calcext:value-type="float">
            <text:p>31</text:p>
          </table:table-cell>
          <table:table-cell table:style-name="ce449" table:formula="of:=+[.B54]" office:value-type="float" office:value="4154" calcext:value-type="float">
            <text:p>4,154.00</text:p>
          </table:table-cell>
          <table:table-cell table:style-name="ce450" table:formula="of:=[.K54]" office:value-type="float" office:value="4154" calcext:value-type="float">
            <text:p>4,154.00</text:p>
          </table:table-cell>
          <table:table-cell table:style-name="ce464"/>
          <table:table-cell table:style-name="ce468"/>
          <table:table-cell table:style-name="ce462"/>
          <table:table-cell table:number-columns-repeated="16369"/>
        </table:table-row>
        <table:table-row table:style-name="ro1">
          <table:table-cell table:style-name="ce392" office:value-type="string" calcext:value-type="string">
            <text:p>I.1.3. <text:s/>VEHICULOS</text:p>
          </table:table-cell>
          <table:table-cell table:style-name="ce401" table:formula="of:=SUM([.B56:.B56])" office:value-type="float" office:value="0" calcext:value-type="float">
            <text:p>0.00</text:p>
          </table:table-cell>
          <table:table-cell table:style-name="ce411" table:formula="of:=SUM([.C56:.C56])" office:value-type="float" office:value="0" calcext:value-type="float">
            <text:p>0.00</text:p>
          </table:table-cell>
          <table:table-cell table:style-name="ce411" table:formula="of:=SUM([.D56:.D56])" office:value-type="float" office:value="0" calcext:value-type="float">
            <text:p>0.00</text:p>
          </table:table-cell>
          <table:table-cell table:style-name="ce339"/>
          <table:table-cell table:number-columns-repeated="2"/>
          <table:table-cell table:style-name="ce430" table:formula="of:=+[.A55]" office:value-type="string" office:string-value="I.1.3.  VEHICULOS" calcext:value-type="string">
            <text:p>I.1.3. <text:s/>VEHICULOS</text:p>
          </table:table-cell>
          <table:table-cell table:style-name="ce430" table:number-columns-repeated="2"/>
          <table:table-cell table:style-name="ce445" table:formula="of:=SUM([.K56:.K56])" office:value-type="float" office:value="0" calcext:value-type="float">
            <text:p>0.00</text:p>
          </table:table-cell>
          <table:table-cell table:style-name="ce445" table:formula="of:=SUM([.L56:.L56])" office:value-type="float" office:value="0" calcext:value-type="float">
            <text:p>0.00</text:p>
          </table:table-cell>
          <table:table-cell table:style-name="ce445" table:formula="of:=SUM([.M56:.M56])" office:value-type="float" office:value="0" calcext:value-type="float">
            <text:p>0.00</text:p>
          </table:table-cell>
          <table:table-cell table:style-name="ce445" table:formula="of:=SUM([.N56:.N56])" office:value-type="float" office:value="0" calcext:value-type="float">
            <text:p>0.00</text:p>
          </table:table-cell>
          <table:table-cell table:style-name="ce445" table:formula="of:=SUM([.O56:.O56])" office:value-type="float" office:value="0" calcext:value-type="float">
            <text:p>0.00</text:p>
          </table:table-cell>
          <table:table-cell table:number-columns-repeated="16369"/>
        </table:table-row>
        <table:table-row table:style-name="ro1">
          <table:table-cell table:style-name="ce395" table:formula="of:=+[$'MUEB, MAQ,EQUIP'.B27]" office:value-type="string" office:string-value="Camion pequeño de carga" calcext:value-type="string">
            <text:p>Camion pequeño de carga</text:p>
          </table:table-cell>
          <table:table-cell table:style-name="ce264" table:formula="of:=+[$'MUEB, MAQ,EQUIP'.F27]" office:value-type="float" office:value="0" calcext:value-type="float">
            <text:p>0.00</text:p>
          </table:table-cell>
          <table:table-cell table:style-name="ce413" table:number-columns-repeated="2"/>
          <table:table-cell table:style-name="ce339"/>
          <table:table-cell table:number-columns-repeated="2"/>
          <table:table-cell table:style-name="ce433" table:formula="of:=+[$'MUEB, MAQ,EQUIP'.B27]" office:value-type="string" office:string-value="Camion pequeño de carga" calcext:value-type="string">
            <text:p>Camion pequeño de carga</text:p>
          </table:table-cell>
          <table:table-cell table:style-name="ce440" table:formula="of:=+[$'MUEB, MAQ,EQUIP'.C27]" office:value-type="string" office:string-value="und" calcext:value-type="string">
            <text:p>und</text:p>
          </table:table-cell>
          <table:table-cell table:style-name="ce440" table:formula="of:=+[$'MUEB, MAQ,EQUIP'.D27]" office:value-type="float" office:value="0" calcext:value-type="float">
            <text:p>0</text:p>
          </table:table-cell>
          <table:table-cell table:style-name="ce450" table:formula="of:=+[.B56]" office:value-type="float" office:value="0" calcext:value-type="float">
            <text:p>0.00</text:p>
          </table:table-cell>
          <table:table-cell table:style-name="ce450"/>
          <table:table-cell table:style-name="ce464"/>
          <table:table-cell table:style-name="ce468"/>
          <table:table-cell table:style-name="ce462" table:formula="of:=IF(SUM([.M56:.N56])&gt;0;SUM([.M56:.N56]);&quot;&quot;)">
            <text:p/>
          </table:table-cell>
          <table:table-cell table:number-columns-repeated="16369"/>
        </table:table-row>
        <table:table-row table:style-name="ro1">
          <table:table-cell table:style-name="ce392" office:value-type="string" calcext:value-type="string">
            <text:p>I.1.4. MUEBLES Y ENSERES</text:p>
          </table:table-cell>
          <table:table-cell table:style-name="ce401" table:formula="of:=SUM([.B58:.B60])" office:value-type="float" office:value="5300" calcext:value-type="float">
            <text:p>5300.00</text:p>
          </table:table-cell>
          <table:table-cell table:style-name="ce411" table:formula="of:=SUM([.C58:.C60])" office:value-type="float" office:value="5000" calcext:value-type="float">
            <text:p>5,000.00</text:p>
          </table:table-cell>
          <table:table-cell table:style-name="ce411" table:formula="of:=SUM([.D58:.D60])" office:value-type="float" office:value="300" calcext:value-type="float">
            <text:p>300.00</text:p>
          </table:table-cell>
          <table:table-cell table:style-name="ce339"/>
          <table:table-cell table:number-columns-repeated="2"/>
          <table:table-cell table:style-name="ce430" table:formula="of:=+[.A57]" office:value-type="string" office:string-value="I.1.4. MUEBLES Y ENSERES" calcext:value-type="string">
            <text:p>I.1.4. MUEBLES Y ENSERES</text:p>
          </table:table-cell>
          <table:table-cell table:style-name="ce430" table:number-columns-repeated="2"/>
          <table:table-cell table:style-name="ce445" table:formula="of:=SUM([.K58:.K60])" office:value-type="float" office:value="5300" calcext:value-type="float">
            <text:p>5,300.00</text:p>
          </table:table-cell>
          <table:table-cell table:style-name="ce445" table:formula="of:=SUM([.L58:.L60])" office:value-type="float" office:value="300" calcext:value-type="float">
            <text:p>300.00</text:p>
          </table:table-cell>
          <table:table-cell table:style-name="ce445" table:formula="of:=SUM([.M58:.M60])" office:value-type="float" office:value="5000" calcext:value-type="float">
            <text:p>5,000.00</text:p>
          </table:table-cell>
          <table:table-cell table:style-name="ce445" table:formula="of:=SUM([.N58:.N60])" office:value-type="float" office:value="0" calcext:value-type="float">
            <text:p>0.00</text:p>
          </table:table-cell>
          <table:table-cell table:style-name="ce445" table:formula="of:=SUM([.O58:.O60])" office:value-type="float" office:value="5000" calcext:value-type="float">
            <text:p>5,000.00</text:p>
          </table:table-cell>
          <table:table-cell table:number-columns-repeated="16369"/>
        </table:table-row>
        <table:table-row table:style-name="ro1">
          <table:table-cell table:style-name="ce396" table:formula="of:=+[$'MUEB, MAQ,EQUIP'.B34]" office:value-type="string" office:string-value="Reproductor Cuy Hembra" calcext:value-type="string">
            <text:p>Reproductor Cuy Hembra</text:p>
          </table:table-cell>
          <table:table-cell table:style-name="ce406" table:formula="of:=+[$'MUEB, MAQ,EQUIP'.F34]" office:value-type="float" office:value="4250" calcext:value-type="float">
            <text:p>4250.00</text:p>
          </table:table-cell>
          <table:table-cell table:style-name="ce413" table:formula="of:=+[.B58]" office:value-type="float" office:value="4250" calcext:value-type="float">
            <text:p>4,250.00</text:p>
          </table:table-cell>
          <table:table-cell table:style-name="ce413"/>
          <table:table-cell table:style-name="ce339"/>
          <table:table-cell table:number-columns-repeated="2"/>
          <table:table-cell table:style-name="ce434" table:formula="of:=+[$'MUEB, MAQ,EQUIP'.B34]" office:value-type="string" office:string-value="Reproductor Cuy Hembra" calcext:value-type="string">
            <text:p>Reproductor Cuy Hembra</text:p>
          </table:table-cell>
          <table:table-cell table:style-name="ce441" table:formula="of:=+[$'MUEB, MAQ,EQUIP'.C34]" office:value-type="string" office:string-value="und" calcext:value-type="string">
            <text:p>und</text:p>
          </table:table-cell>
          <table:table-cell table:style-name="ce441" table:formula="of:=+[$'MUEB, MAQ,EQUIP'.D34]" office:value-type="float" office:value="85" calcext:value-type="float">
            <text:p>85</text:p>
          </table:table-cell>
          <table:table-cell table:style-name="ce451" table:formula="of:=+[.B58]" office:value-type="float" office:value="4250" calcext:value-type="float">
            <text:p>4,250.00</text:p>
          </table:table-cell>
          <table:table-cell table:style-name="ce450"/>
          <table:table-cell table:style-name="ce464" table:formula="of:=+[.K58]" office:value-type="float" office:value="4250" calcext:value-type="float">
            <text:p>4,250.00</text:p>
          </table:table-cell>
          <table:table-cell table:style-name="ce468"/>
          <table:table-cell table:style-name="ce462" table:formula="of:=IF(SUM([.M58:.N58])&gt;0;SUM([.M58:.N58]);&quot;&quot;)" office:value-type="float" office:value="4250" calcext:value-type="float">
            <text:p>4,250.00</text:p>
          </table:table-cell>
          <table:table-cell table:number-columns-repeated="16369"/>
        </table:table-row>
        <table:table-row table:style-name="ro1">
          <table:table-cell table:style-name="ce396" table:formula="of:=+[$'MUEB, MAQ,EQUIP'.B35]" office:value-type="string" office:string-value="Reproductor Cuy Macho" calcext:value-type="string">
            <text:p>Reproductor Cuy Macho</text:p>
          </table:table-cell>
          <table:table-cell table:style-name="ce406" table:formula="of:=+[$'MUEB, MAQ,EQUIP'.F35]" office:value-type="float" office:value="750" calcext:value-type="float">
            <text:p>750.00</text:p>
          </table:table-cell>
          <table:table-cell table:style-name="ce413" table:formula="of:=+[.B59]" office:value-type="float" office:value="750" calcext:value-type="float">
            <text:p>750.00</text:p>
          </table:table-cell>
          <table:table-cell table:style-name="ce413"/>
          <table:table-cell table:style-name="ce339"/>
          <table:table-cell table:number-columns-repeated="2"/>
          <table:table-cell table:style-name="ce434" table:formula="of:=+[$'MUEB, MAQ,EQUIP'.B35]" office:value-type="string" office:string-value="Reproductor Cuy Macho" calcext:value-type="string">
            <text:p>Reproductor Cuy Macho</text:p>
          </table:table-cell>
          <table:table-cell table:style-name="ce441" table:formula="of:=+[$'MUEB, MAQ,EQUIP'.C35]" office:value-type="string" office:string-value="und" calcext:value-type="string">
            <text:p>und</text:p>
          </table:table-cell>
          <table:table-cell table:style-name="ce441" table:formula="of:=+[$'MUEB, MAQ,EQUIP'.D35]" office:value-type="float" office:value="15" calcext:value-type="float">
            <text:p>15</text:p>
          </table:table-cell>
          <table:table-cell table:style-name="ce451" table:formula="of:=+[.B59]" office:value-type="float" office:value="750" calcext:value-type="float">
            <text:p>750.00</text:p>
          </table:table-cell>
          <table:table-cell table:style-name="ce450"/>
          <table:table-cell table:style-name="ce464" table:formula="of:=+[.K59]" office:value-type="float" office:value="750" calcext:value-type="float">
            <text:p>750.00</text:p>
          </table:table-cell>
          <table:table-cell table:style-name="ce468"/>
          <table:table-cell table:style-name="ce462" table:formula="of:=IF(SUM([.M59:.N59])&gt;0;SUM([.M59:.N59]);&quot;&quot;)" office:value-type="float" office:value="750" calcext:value-type="float">
            <text:p>750.00</text:p>
          </table:table-cell>
          <table:table-cell table:number-columns-repeated="16369"/>
        </table:table-row>
        <table:table-row table:style-name="ro1">
          <table:table-cell table:style-name="ce396" table:formula="of:=+[$'MUEB, MAQ,EQUIP'.B36]" office:value-type="string" office:string-value="Cartel del Proyecto" calcext:value-type="string">
            <text:p>Cartel del Proyecto</text:p>
          </table:table-cell>
          <table:table-cell table:style-name="ce406" table:formula="of:=+[$'MUEB, MAQ,EQUIP'.F36]" office:value-type="float" office:value="300" calcext:value-type="float">
            <text:p>300.00</text:p>
          </table:table-cell>
          <table:table-cell table:style-name="ce413"/>
          <table:table-cell table:style-name="ce413" table:formula="of:=+[.B60]" office:value-type="float" office:value="300" calcext:value-type="float">
            <text:p>300.00</text:p>
          </table:table-cell>
          <table:table-cell table:style-name="ce339"/>
          <table:table-cell table:number-columns-repeated="2"/>
          <table:table-cell table:style-name="ce434" table:formula="of:=+[$'MUEB, MAQ,EQUIP'.B36]" office:value-type="string" office:string-value="Cartel del Proyecto" calcext:value-type="string">
            <text:p>Cartel del Proyecto</text:p>
          </table:table-cell>
          <table:table-cell table:style-name="ce441" table:formula="of:=+[$'MUEB, MAQ,EQUIP'.C36]" office:value-type="string" office:string-value="und" calcext:value-type="string">
            <text:p>und</text:p>
          </table:table-cell>
          <table:table-cell table:style-name="ce441" table:formula="of:=+[$'MUEB, MAQ,EQUIP'.D36]" office:value-type="float" office:value="1" calcext:value-type="float">
            <text:p>1</text:p>
          </table:table-cell>
          <table:table-cell table:style-name="ce451" table:formula="of:=+[.B60]" office:value-type="float" office:value="300" calcext:value-type="float">
            <text:p>300.00</text:p>
          </table:table-cell>
          <table:table-cell table:style-name="ce450" table:formula="of:=+[.K60]" office:value-type="float" office:value="300" calcext:value-type="float">
            <text:p>300.00</text:p>
          </table:table-cell>
          <table:table-cell table:style-name="ce464"/>
          <table:table-cell table:style-name="ce468"/>
          <table:table-cell table:style-name="ce462" table:formula="of:=IF(SUM([.M60:.N60])&gt;0;SUM([.M60:.N60]);&quot;&quot;)">
            <text:p/>
          </table:table-cell>
          <table:table-cell table:number-columns-repeated="16369"/>
        </table:table-row>
        <table:table-row table:style-name="ro1">
          <table:table-cell table:style-name="ce392" office:value-type="string" calcext:value-type="string">
            <text:p>I.2. INVERSION FIJA INTANGIBLE</text:p>
          </table:table-cell>
          <table:table-cell table:style-name="ce401" table:formula="of:=SUM([.B62:.B64])" office:value-type="float" office:value="18250" calcext:value-type="float">
            <text:p>18250.00</text:p>
          </table:table-cell>
          <table:table-cell table:style-name="ce411" table:formula="of:=SUM([.C62:.C62])" office:value-type="float" office:value="0" calcext:value-type="float">
            <text:p>0.00</text:p>
          </table:table-cell>
          <table:table-cell table:style-name="ce411" table:formula="of:=SUM([.D62:.D64])" office:value-type="float" office:value="18250" calcext:value-type="float">
            <text:p>18,250.00</text:p>
          </table:table-cell>
          <table:table-cell table:style-name="ce422"/>
          <table:table-cell table:number-columns-repeated="2"/>
          <table:table-cell table:style-name="ce430" table:formula="of:=+[.A61]" office:value-type="string" office:string-value="I.2. INVERSION FIJA INTANGIBLE" calcext:value-type="string">
            <text:p>I.2. INVERSION FIJA INTANGIBLE</text:p>
          </table:table-cell>
          <table:table-cell table:style-name="ce430" table:number-columns-repeated="2"/>
          <table:table-cell table:style-name="ce445" table:formula="of:=SUM([.K62:.K64])" office:value-type="float" office:value="18250" calcext:value-type="float">
            <text:p>18,250.00</text:p>
          </table:table-cell>
          <table:table-cell table:style-name="ce445" table:formula="of:=SUM([.L62:.L64])" office:value-type="float" office:value="18250" calcext:value-type="float">
            <text:p>18,250.00</text:p>
          </table:table-cell>
          <table:table-cell table:style-name="ce460" table:formula="of:=SUM([.M62:.M62])" office:value-type="float" office:value="0" calcext:value-type="float">
            <text:p>0.00</text:p>
          </table:table-cell>
          <table:table-cell table:style-name="ce460" table:formula="of:=SUM([.N62:.N62])" office:value-type="float" office:value="0" calcext:value-type="float">
            <text:p>0.00</text:p>
          </table:table-cell>
          <table:table-cell table:style-name="ce460" table:formula="of:=SUM([.O62:.O62])" office:value-type="float" office:value="0" calcext:value-type="float">
            <text:p>0.00</text:p>
          </table:table-cell>
          <table:table-cell table:number-columns-repeated="16369"/>
        </table:table-row>
        <table:table-row table:style-name="ro1">
          <table:table-cell table:style-name="ce395" table:formula="of:=+[$'INVERS FIJ INTANG'.A4]" office:value-type="string" office:string-value="Asistencia Tecnica" calcext:value-type="string">
            <text:p>Asistencia Tecnica</text:p>
          </table:table-cell>
          <table:table-cell table:style-name="ce407" table:formula="of:=+[$'INVERS FIJ INTANG'.E4]" office:value-type="float" office:value="15000" calcext:value-type="float">
            <text:p>15000.00</text:p>
          </table:table-cell>
          <table:table-cell table:style-name="ce413"/>
          <table:table-cell table:style-name="ce420" table:formula="of:=[.B62]" office:value-type="float" office:value="15000" calcext:value-type="float">
            <text:p>15,000.00</text:p>
          </table:table-cell>
          <table:table-cell table:style-name="ce339"/>
          <table:table-cell table:number-columns-repeated="2"/>
          <table:table-cell table:style-name="ce435" table:formula="of:=+[$'INVERS FIJ INTANG'.A4]" office:value-type="string" office:string-value="Asistencia Tecnica" calcext:value-type="string">
            <text:p>Asistencia Tecnica</text:p>
          </table:table-cell>
          <table:table-cell table:style-name="ce440" table:formula="of:=+[$'INVERS FIJ INTANG'.B4]" office:value-type="string" office:string-value="mes" calcext:value-type="string">
            <text:p>mes</text:p>
          </table:table-cell>
          <table:table-cell table:style-name="ce440" table:formula="of:=+[$'INVERS FIJ INTANG'.C4]" office:value-type="float" office:value="5" calcext:value-type="float">
            <text:p>5</text:p>
          </table:table-cell>
          <table:table-cell table:style-name="ce450" table:formula="of:=+[.B62]" office:value-type="float" office:value="15000" calcext:value-type="float">
            <text:p>15,000.00</text:p>
          </table:table-cell>
          <table:table-cell table:style-name="ce234" table:formula="of:=[.K62]" office:value-type="float" office:value="15000" calcext:value-type="float">
            <text:p>15,000.00</text:p>
          </table:table-cell>
          <table:table-cell table:style-name="ce464"/>
          <table:table-cell table:style-name="ce468"/>
          <table:table-cell table:style-name="ce462" table:formula="of:=IF(SUM([.M62:.N62])&gt;0;SUM([.M62:.N62]);&quot;&quot;)">
            <text:p/>
          </table:table-cell>
          <table:table-cell table:number-columns-repeated="16369"/>
        </table:table-row>
        <table:table-row table:style-name="ro1">
          <table:table-cell table:style-name="ce395" table:formula="of:=+[$'INVERS FIJ INTANG'.A5]" office:value-type="string" office:string-value="Publicidad y Marketing" calcext:value-type="string">
            <text:p>Publicidad y Marketing</text:p>
          </table:table-cell>
          <table:table-cell table:style-name="ce407" table:formula="of:=+[$'INVERS FIJ INTANG'.E5]" office:value-type="float" office:value="1750" calcext:value-type="float">
            <text:p>1750.00</text:p>
          </table:table-cell>
          <table:table-cell table:style-name="ce413"/>
          <table:table-cell table:style-name="ce420" table:formula="of:=[.B63]" office:value-type="float" office:value="1750" calcext:value-type="float">
            <text:p>1,750.00</text:p>
          </table:table-cell>
          <table:table-cell table:style-name="ce339"/>
          <table:table-cell table:number-columns-repeated="2"/>
          <table:table-cell table:style-name="ce435" table:formula="of:=+[$'INVERS FIJ INTANG'.A5]" office:value-type="string" office:string-value="Publicidad y Marketing" calcext:value-type="string">
            <text:p>Publicidad y Marketing</text:p>
          </table:table-cell>
          <table:table-cell table:style-name="ce440" table:formula="of:=+[$'INVERS FIJ INTANG'.B5]" office:value-type="string" office:string-value="mes" calcext:value-type="string">
            <text:p>mes</text:p>
          </table:table-cell>
          <table:table-cell table:style-name="ce440" table:formula="of:=+[$'INVERS FIJ INTANG'.C5]" office:value-type="float" office:value="5" calcext:value-type="float">
            <text:p>5</text:p>
          </table:table-cell>
          <table:table-cell table:style-name="ce450" table:formula="of:=+[.B63]" office:value-type="float" office:value="1750" calcext:value-type="float">
            <text:p>1,750.00</text:p>
          </table:table-cell>
          <table:table-cell table:style-name="ce234" table:formula="of:=[.K63]" office:value-type="float" office:value="1750" calcext:value-type="float">
            <text:p>1,750.00</text:p>
          </table:table-cell>
          <table:table-cell table:style-name="ce464"/>
          <table:table-cell table:style-name="ce468"/>
          <table:table-cell table:style-name="ce462"/>
          <table:table-cell table:number-columns-repeated="16369"/>
        </table:table-row>
        <table:table-row table:style-name="ro1">
          <table:table-cell table:style-name="ce395" table:formula="of:=+[$'INVERS FIJ INTANG'.A6]" office:value-type="string" office:string-value="Flete Terrestre" calcext:value-type="string">
            <text:p>Flete Terrestre</text:p>
          </table:table-cell>
          <table:table-cell table:style-name="ce407" table:formula="of:=+[$'INVERS FIJ INTANG'.E6]" office:value-type="float" office:value="1500" calcext:value-type="float">
            <text:p>1500.00</text:p>
          </table:table-cell>
          <table:table-cell table:style-name="ce413"/>
          <table:table-cell table:style-name="ce420" table:formula="of:=[.B64]" office:value-type="float" office:value="1500" calcext:value-type="float">
            <text:p>1,500.00</text:p>
          </table:table-cell>
          <table:table-cell table:style-name="ce339"/>
          <table:table-cell table:number-columns-repeated="2"/>
          <table:table-cell table:style-name="ce435" table:formula="of:=+[$'INVERS FIJ INTANG'.A6]" office:value-type="string" office:string-value="Flete Terrestre" calcext:value-type="string">
            <text:p>Flete Terrestre</text:p>
          </table:table-cell>
          <table:table-cell table:style-name="ce440" table:formula="of:=+[$'INVERS FIJ INTANG'.B6]" office:value-type="string" office:string-value="Gbl" calcext:value-type="string">
            <text:p>Gbl</text:p>
          </table:table-cell>
          <table:table-cell table:style-name="ce440" table:formula="of:=+[$'INVERS FIJ INTANG'.C6]" office:value-type="float" office:value="1" calcext:value-type="float">
            <text:p>1</text:p>
          </table:table-cell>
          <table:table-cell table:style-name="ce450" table:formula="of:=+[.B64]" office:value-type="float" office:value="1500" calcext:value-type="float">
            <text:p>1,500.00</text:p>
          </table:table-cell>
          <table:table-cell table:style-name="ce234" table:formula="of:=[.K64]" office:value-type="float" office:value="1500" calcext:value-type="float">
            <text:p>1,500.00</text:p>
          </table:table-cell>
          <table:table-cell table:style-name="ce464"/>
          <table:table-cell table:style-name="ce468"/>
          <table:table-cell table:style-name="ce462"/>
          <table:table-cell table:number-columns-repeated="16369"/>
        </table:table-row>
        <table:table-row table:style-name="ro1">
          <table:table-cell table:style-name="ce391" office:value-type="string" calcext:value-type="string">
            <text:p>II. CAPITAL DE TRABAJO</text:p>
          </table:table-cell>
          <table:table-cell table:style-name="ce400" table:formula="of:=+[$'CAP TRABAJ'.C28]" office:value-type="float" office:value="4173.44538552312" calcext:value-type="float">
            <text:p>4173.45</text:p>
          </table:table-cell>
          <table:table-cell table:style-name="ce416" table:formula="of:=+[.B65]" office:value-type="float" office:value="4173.44538552312" calcext:value-type="float">
            <text:p>4,173.45</text:p>
          </table:table-cell>
          <table:table-cell table:style-name="ce411"/>
          <table:table-cell table:style-name="ce422"/>
          <table:table-cell table:number-columns-repeated="2"/>
          <table:table-cell table:style-name="ce430" table:formula="of:=+[.A65]" office:value-type="string" office:string-value="II. CAPITAL DE TRABAJO" calcext:value-type="string">
            <text:p>II. CAPITAL DE TRABAJO</text:p>
          </table:table-cell>
          <table:table-cell table:style-name="ce430" table:number-columns-repeated="2"/>
          <table:table-cell table:style-name="ce445" table:formula="of:=+[.B65]" office:value-type="float" office:value="4173.44538552312" calcext:value-type="float">
            <text:p>4,173.45</text:p>
          </table:table-cell>
          <table:table-cell table:style-name="ce445" table:number-columns-repeated="2"/>
          <table:table-cell table:style-name="ce445" table:formula="of:=+[.K65]" office:value-type="float" office:value="4173.44538552312" calcext:value-type="float">
            <text:p>4,173.45</text:p>
          </table:table-cell>
          <table:table-cell table:style-name="ce462" table:formula="of:=IF(SUM([.M65:.N65])&gt;0;SUM([.M65:.N65]);&quot;&quot;)" office:value-type="float" office:value="4173.44538552312" calcext:value-type="float">
            <text:p>4,173.45</text:p>
          </table:table-cell>
          <table:table-cell table:number-columns-repeated="16369"/>
        </table:table-row>
        <table:table-row table:style-name="ro1">
          <table:table-cell table:style-name="ce391" office:value-type="string" calcext:value-type="string">
            <text:p>III. GASTOS GENERALES (8.00 %)</text:p>
          </table:table-cell>
          <table:table-cell table:style-name="ce400" table:formula="of:=0.08*[.B6]" office:value-type="float" office:value="9706.08" calcext:value-type="float">
            <text:p>9706.08</text:p>
          </table:table-cell>
          <table:table-cell table:style-name="ce413"/>
          <table:table-cell table:style-name="ce415" table:formula="of:=[.B66]" office:value-type="float" office:value="9706.08" calcext:value-type="float">
            <text:p>9,706.08</text:p>
          </table:table-cell>
          <table:table-cell table:style-name="ce339"/>
          <table:table-cell table:number-columns-repeated="2"/>
          <table:table-cell table:style-name="ce430" table:formula="of:=+[.A66]" office:value-type="string" office:string-value="III. GASTOS GENERALES (8.00 %)" calcext:value-type="string">
            <text:p>III. GASTOS GENERALES (8.00 %)</text:p>
          </table:table-cell>
          <table:table-cell table:style-name="ce430" table:number-columns-repeated="2"/>
          <table:table-cell table:style-name="ce445" table:formula="of:=0.08*[.K6]" office:value-type="float" office:value="9706.08" calcext:value-type="float">
            <text:p>9,706.08</text:p>
          </table:table-cell>
          <table:table-cell table:style-name="ce457" table:formula="of:=[.K66]" office:value-type="float" office:value="9706.08" calcext:value-type="float">
            <text:p>9,706.08</text:p>
          </table:table-cell>
          <table:table-cell table:style-name="ce464"/>
          <table:table-cell table:style-name="ce468"/>
          <table:table-cell table:style-name="ce457"/>
          <table:table-cell table:number-columns-repeated="16369"/>
        </table:table-row>
        <table:table-row table:style-name="ro1">
          <table:table-cell table:style-name="ce391" office:value-type="string" calcext:value-type="string">
            <text:p>IV. <text:s/>GASTOS DE SUPERVISION (4.0%)</text:p>
          </table:table-cell>
          <table:table-cell table:style-name="ce400" table:formula="of:=0.04*[.B6]" office:value-type="float" office:value="4853.04" calcext:value-type="float">
            <text:p>4853.04</text:p>
          </table:table-cell>
          <table:table-cell table:style-name="ce417"/>
          <table:table-cell table:style-name="ce415" table:formula="of:=[.B67]" office:value-type="float" office:value="4853.04" calcext:value-type="float">
            <text:p>4,853.04</text:p>
          </table:table-cell>
          <table:table-cell table:style-name="ce339"/>
          <table:table-cell table:number-columns-repeated="2"/>
          <table:table-cell table:style-name="ce430" table:formula="of:=+[.A67]" office:value-type="string" office:string-value="IV.  GASTOS DE SUPERVISION (4.0%)" calcext:value-type="string">
            <text:p>IV. <text:s/>GASTOS DE SUPERVISION (4.0%)</text:p>
          </table:table-cell>
          <table:table-cell table:style-name="ce430" table:number-columns-repeated="2"/>
          <table:table-cell table:style-name="ce445" table:formula="of:=0.04*[.K6]" office:value-type="float" office:value="4853.04" calcext:value-type="float">
            <text:p>4,853.04</text:p>
          </table:table-cell>
          <table:table-cell table:style-name="ce457" table:formula="of:=[.K67]" office:value-type="float" office:value="4853.04" calcext:value-type="float">
            <text:p>4,853.04</text:p>
          </table:table-cell>
          <table:table-cell table:style-name="ce464"/>
          <table:table-cell table:style-name="ce468"/>
          <table:table-cell table:style-name="ce457"/>
          <table:table-cell table:number-columns-repeated="16369"/>
        </table:table-row>
        <table:table-row table:style-name="ro1">
          <table:table-cell table:style-name="ce397" office:value-type="string" calcext:value-type="string">
            <text:p>TOTAL INVERSIÓN</text:p>
          </table:table-cell>
          <table:table-cell table:style-name="ce408" table:formula="of:=[.B7]+[.B61]+[.B65]+[.B66]+[.B67]" office:value-type="float" office:value="140058.565385523" calcext:value-type="float">
            <text:p>140,058.57</text:p>
          </table:table-cell>
          <table:table-cell table:style-name="ce408" table:formula="of:=[.C7]+[.C61]+[.C65]+[.C66]+[.C67]" office:value-type="float" office:value="30695.4453855231" calcext:value-type="float">
            <text:p>30,695.45</text:p>
          </table:table-cell>
          <table:table-cell table:style-name="ce408" table:formula="of:=[.D7]+[.D61]+[.D65]+[.D66]+[.D67]" office:value-type="float" office:value="109363.12" calcext:value-type="float">
            <text:p>109,363.12</text:p>
          </table:table-cell>
          <table:table-cell table:style-name="ce423" table:formula="of:=+[.D68]+[.C68]" office:value-type="float" office:value="140058.565385523" calcext:value-type="float">
            <text:p>140,058.57</text:p>
          </table:table-cell>
          <table:table-cell table:number-columns-repeated="2"/>
          <table:table-cell table:style-name="ce436" table:formula="of:=+[.A68]" office:value-type="string" office:string-value="TOTAL INVERSIÓN" calcext:value-type="string" table:number-columns-spanned="3" table:number-rows-spanned="1">
            <text:p>TOTAL INVERSIÓN</text:p>
          </table:table-cell>
          <table:covered-table-cell table:style-name="ce442"/>
          <table:covered-table-cell table:style-name="ce443"/>
          <table:table-cell table:style-name="ce452" table:formula="of:=[.K7]+[.K61]+[.K65]+[.K66]+[.K67]" office:value-type="float" office:value="140058.565385523" calcext:value-type="float">
            <text:p>140,058.57</text:p>
          </table:table-cell>
          <table:table-cell table:style-name="ce452" table:formula="of:=[.L7]+[.L61]+[.L65]+[.L66]+[.L67]" office:value-type="float" office:value="109363.12" calcext:value-type="float">
            <text:p>109,363.12</text:p>
          </table:table-cell>
          <table:table-cell table:style-name="ce466" table:formula="of:=[.M7]+[.M61]+[.M65]+[.M66]+[.M67]" office:value-type="float" office:value="5000" calcext:value-type="float">
            <text:p>5,000.00</text:p>
          </table:table-cell>
          <table:table-cell table:style-name="ce466" table:formula="of:=[.N7]+[.N61]+[.N65]+[.N66]+[.N67]" office:value-type="float" office:value="25695.4453855231" calcext:value-type="float">
            <text:p>25,695.45</text:p>
          </table:table-cell>
          <table:table-cell table:style-name="ce466" table:formula="of:=[.O7]+[.O61]+[.O65]+[.O66]+[.O67]" office:value-type="float" office:value="30695.4453855231" calcext:value-type="float">
            <text:p>30,695.45</text:p>
          </table:table-cell>
          <table:table-cell table:style-name="ce421" table:formula="of:=+[.M68]+[.N68]" office:value-type="float" office:value="30695.4453855231" calcext:value-type="float">
            <text:p>30695.45</text:p>
          </table:table-cell>
          <table:table-cell table:number-columns-repeated="16368"/>
        </table:table-row>
        <table:table-row table:style-name="ro1">
          <table:table-cell/>
          <table:table-cell table:formula="of:=+[.C68]+[.D68]" office:value-type="float" office:value="140058.565385523" calcext:value-type="float">
            <text:p>140058.57</text:p>
          </table:table-cell>
          <table:table-cell table:number-columns-repeated="2"/>
          <table:table-cell table:style-name="ce422"/>
          <table:table-cell table:number-columns-repeated="2"/>
          <table:table-cell table:style-name="ce353" office:value-type="string" calcext:value-type="string" table:number-columns-spanned="3" table:number-rows-spanned="1">
            <text:p>PORCENTAJE</text:p>
          </table:table-cell>
          <table:covered-table-cell table:number-columns-repeated="2" table:style-name="ce353"/>
          <table:table-cell table:style-name="ce453" table:formula="of:=+[.L69]+[.O69]" office:value-type="percentage" office:value="1" calcext:value-type="percentage">
            <text:p>100.00 %</text:p>
          </table:table-cell>
          <table:table-cell table:style-name="ce453" table:formula="of:=([.L68]/[.K68])" office:value-type="percentage" office:value="0.780838499230438" calcext:value-type="percentage">
            <text:p>78.08 %</text:p>
          </table:table-cell>
          <table:table-cell table:style-name="ce453" table:formula="of:=+[.M68]/[.O68]" office:value-type="percentage" office:value="0.162890615764062" calcext:value-type="percentage">
            <text:p>16.29 %</text:p>
          </table:table-cell>
          <table:table-cell table:style-name="ce453" table:formula="of:=+[.N68]/[.O68]" office:value-type="percentage" office:value="0.837109384235938" calcext:value-type="percentage">
            <text:p>83.71 %</text:p>
          </table:table-cell>
          <table:table-cell table:style-name="ce453" table:formula="of:=([.O68]/[.K68])" office:value-type="percentage" office:value="0.219161500769562" calcext:value-type="percentage">
            <text:p>21.92 %</text:p>
          </table:table-cell>
          <table:table-cell table:style-name="ce471" table:formula="of:=+[.O69]+[.L69]" office:value-type="percentage" office:value="1" calcext:value-type="percentage">
            <text:p>100.00 %</text:p>
          </table:table-cell>
          <table:table-cell table:number-columns-repeated="16368"/>
        </table:table-row>
        <table:table-row table:style-name="ro1">
          <table:table-cell/>
          <table:table-cell table:style-name="ce409" table:formula="of:=+[.D70]+[.C70]" office:value-type="percentage" office:value="1" calcext:value-type="percentage">
            <text:p>100 %</text:p>
          </table:table-cell>
          <table:table-cell table:style-name="ce418" table:formula="of:=+[.C68]/[.B68]" office:value-type="percentage" office:value="0.219161500769562" calcext:value-type="percentage">
            <text:p>21.92 %</text:p>
          </table:table-cell>
          <table:table-cell table:style-name="ce418" table:formula="of:=+[.D68]/[.B68]" office:value-type="percentage" office:value="0.780838499230438" calcext:value-type="percentage">
            <text:p>78.08 %</text:p>
          </table:table-cell>
          <table:table-cell table:style-name="ce339"/>
          <table:table-cell table:number-columns-repeated="5"/>
          <table:table-cell table:style-name="ce454" table:formula="of:=+[.L68]+[.O68]" office:value-type="float" office:value="140058.565385523" calcext:value-type="float">
            <text:p>140,058.57</text:p>
          </table:table-cell>
          <table:table-cell table:number-columns-repeated="16373"/>
        </table:table-row>
        <table:table-row table:style-name="ro1">
          <table:table-cell/>
          <table:table-cell table:style-name="ce410" table:formula="of:=+[.B69]-[.B68]" office:value-type="float" office:value="0" calcext:value-type="float">
            <text:p>0.00</text:p>
          </table:table-cell>
          <table:table-cell table:number-columns-repeated="2"/>
          <table:table-cell table:style-name="ce339"/>
          <table:table-cell table:number-columns-repeated="5"/>
          <table:table-cell table:style-name="ce455" table:formula="of:=+[.F16]-[.K68]" office:value-type="float" office:value="0" calcext:value-type="float">
            <text:p>0.00</text:p>
          </table:table-cell>
          <table:table-cell table:number-columns-repeated="16373"/>
        </table:table-row>
        <table:table-row table:style-name="ro1">
          <table:table-cell table:number-columns-repeated="2"/>
          <table:table-cell table:style-name="ce419" table:formula="of:=+[.B68]*0.2" office:value-type="float" office:value="28011.7130771046" calcext:value-type="float">
            <text:p>28,011.71</text:p>
          </table:table-cell>
          <table:table-cell/>
          <table:table-cell table:style-name="ce339"/>
          <table:table-cell table:number-columns-repeated="7"/>
          <table:table-cell office:value-type="float" office:value="6000" calcext:value-type="float">
            <text:p>6000</text:p>
          </table:table-cell>
          <table:table-cell/>
          <table:table-cell table:formula="of:=+[.O68]*0.1" office:value-type="float" office:value="3069.54453855231" calcext:value-type="float">
            <text:p>3069.54453855231</text:p>
          </table:table-cell>
          <table:table-cell table:number-columns-repeated="16369"/>
        </table:table-row>
        <table:table-row table:style-name="ro1">
          <table:table-cell table:number-columns-repeated="4"/>
          <table:table-cell table:style-name="ce339"/>
          <table:table-cell table:number-columns-repeated="7"/>
          <table:table-cell table:style-name="ce419" table:formula="of:=+[.M72]-[.M68]" office:value-type="float" office:value="1000" calcext:value-type="float">
            <text:p>1,000.00</text:p>
          </table:table-cell>
          <table:table-cell table:number-columns-repeated="16371"/>
        </table:table-row>
        <table:table-row table:style-name="ro1">
          <table:table-cell table:number-columns-repeated="4"/>
          <table:table-cell table:style-name="ce339"/>
          <table:table-cell table:number-columns-repeated="9"/>
          <table:table-cell table:formula="of:=+[.O68]*0.1" office:value-type="float" office:value="3069.54453855231" calcext:value-type="float">
            <text:p>3069.54453855231</text:p>
          </table:table-cell>
          <table:table-cell table:number-columns-repeated="16369"/>
        </table:table-row>
        <table:table-row table:style-name="ro1">
          <table:table-cell table:number-columns-repeated="4"/>
          <table:table-cell table:style-name="ce339"/>
          <table:table-cell table:number-columns-repeated="16379"/>
        </table:table-row>
        <table:table-row table:style-name="ro1" table:number-rows-repeated="1048500">
          <table:table-cell table:number-columns-repeated="16384"/>
        </table:table-row>
        <table:table-row table:style-name="ro1">
          <table:table-cell table:number-columns-repeated="16384"/>
        </table:table-row>
        <table:named-expressions>
          <table:named-range table:name="_xlnm.Print_Area" table:base-cell-address="$POBLACION.$A$1" table:cell-range-address="$INVERSION.$E$4:.$F$16" table:range-usable-as="print-range"/>
        </table:named-expressions>
      </table:table>
      <table:table table:name="RESUM INVER" table:style-name="ta12" table:print-ranges="'RESUM INVER'.C1:'RESUM INVER'.H17">
        <table:table-column table:style-name="co64" table:default-cell-style-name="ce336"/>
        <table:table-column table:style-name="co69" table:default-cell-style-name="ce336"/>
        <table:table-column table:style-name="co76" table:default-cell-style-name="ce287"/>
        <table:table-column table:style-name="co73" table:default-cell-style-name="ce287"/>
        <table:table-column table:style-name="co74" table:default-cell-style-name="ce287"/>
        <table:table-column table:style-name="co58" table:default-cell-style-name="ce304"/>
        <table:table-column table:style-name="co75" table:default-cell-style-name="ce287"/>
        <table:table-column table:style-name="co28" table:default-cell-style-name="ce336"/>
        <table:table-column table:style-name="co75" table:default-cell-style-name="ce336"/>
        <table:table-column table:style-name="co1" table:number-columns-repeated="16375" table:default-cell-style-name="ce336"/>
        <table:table-row table:style-name="ro14">
          <table:table-cell table:number-columns-repeated="2"/>
          <table:table-cell table:style-name="ce429" office:value-type="string" calcext:value-type="string" table:number-columns-spanned="1" table:number-rows-spanned="5">
            <text:p>CONCEPTO</text:p>
          </table:table-cell>
          <table:table-cell table:style-name="ce429" office:value-type="string" calcext:value-type="string" table:number-columns-spanned="5" table:number-rows-spanned="1">
            <text:p>PRESUPUESTO </text:p>
          </table:table-cell>
          <table:covered-table-cell table:number-columns-repeated="4" table:style-name="ce429"/>
          <table:table-cell table:number-columns-repeated="16376"/>
        </table:table-row>
        <table:table-row table:style-name="ro1">
          <table:table-cell table:number-columns-repeated="2"/>
          <table:covered-table-cell table:style-name="ce429"/>
          <table:table-cell table:style-name="ce429" office:value-type="string" calcext:value-type="string" table:number-columns-spanned="5" table:number-rows-spanned="1">
            <text:p>(Considerado en la Propuesta Productiva)</text:p>
          </table:table-cell>
          <table:covered-table-cell table:number-columns-repeated="4" table:style-name="ce429"/>
          <table:table-cell table:number-columns-repeated="16376"/>
        </table:table-row>
        <table:table-row table:style-name="ro1">
          <table:table-cell table:style-name="ce388" office:value-type="string" calcext:value-type="string">
            <text:p>CUADRO DE PRESUPUESTO</text:p>
          </table:table-cell>
          <table:table-cell/>
          <table:covered-table-cell table:style-name="ce429"/>
          <table:table-cell table:style-name="ce429" office:value-type="string" calcext:value-type="string" table:number-columns-spanned="1" table:number-rows-spanned="3">
            <text:p><text:s/>TOTAL</text:p>
          </table:table-cell>
          <table:table-cell table:style-name="ce456" office:value-type="string" calcext:value-type="string" table:number-columns-spanned="1" table:number-rows-spanned="3">
            <text:p>Monto financiado por el GR</text:p>
          </table:table-cell>
          <table:table-cell table:style-name="ce458" office:value-type="string" calcext:value-type="string" table:number-columns-spanned="3" table:number-rows-spanned="1">
            <text:p>Monto financiado por los AEO</text:p>
          </table:table-cell>
          <table:covered-table-cell table:style-name="ce467"/>
          <table:covered-table-cell table:style-name="ce469"/>
          <table:table-cell table:number-columns-repeated="16376"/>
        </table:table-row>
        <table:table-row table:style-name="ro14">
          <table:table-cell table:style-name="ce389" office:value-type="string" calcext:value-type="string" table:number-columns-spanned="1" table:number-rows-spanned="2">
            <text:p>CONCEPTO</text:p>
          </table:table-cell>
          <table:table-cell/>
          <table:covered-table-cell table:number-columns-repeated="2" table:style-name="ce429"/>
          <table:covered-table-cell table:style-name="ce456"/>
          <table:table-cell table:style-name="ce429" office:value-type="string" calcext:value-type="string">
            <text:p>En efectivo</text:p>
          </table:table-cell>
          <table:table-cell table:style-name="ce429" office:value-type="string" calcext:value-type="string">
            <text:p>En Valorizaciones</text:p>
          </table:table-cell>
          <table:table-cell table:style-name="ce429" office:value-type="string" calcext:value-type="string">
            <text:p>En Total</text:p>
          </table:table-cell>
          <table:table-cell table:number-columns-repeated="16376"/>
        </table:table-row>
        <table:table-row table:style-name="ro1">
          <table:covered-table-cell table:style-name="ce390"/>
          <table:table-cell/>
          <table:covered-table-cell table:number-columns-repeated="2" table:style-name="ce429"/>
          <table:covered-table-cell table:style-name="ce456"/>
          <table:table-cell table:number-columns-repeated="3" table:style-name="ce458" office:value-type="string" calcext:value-type="string">
            <text:p>(s/)</text:p>
          </table:table-cell>
          <table:table-cell table:number-columns-repeated="16376"/>
        </table:table-row>
        <table:table-row table:style-name="ro1">
          <table:table-cell table:style-name="ce391" office:value-type="string" calcext:value-type="string">
            <text:p>I. INVERSION FIJA</text:p>
          </table:table-cell>
          <table:table-cell/>
          <table:table-cell table:style-name="ce430" office:value-type="string" calcext:value-type="string">
            <text:p>I. INVERSION FIJA</text:p>
          </table:table-cell>
          <table:table-cell table:style-name="ce444" table:formula="of:=+[$INVERSION.K6]" office:value-type="float" office:value="121326" calcext:value-type="float">
            <text:p>121,326.00</text:p>
          </table:table-cell>
          <table:table-cell table:style-name="ce444" table:formula="of:=+[$INVERSION.L6]" office:value-type="float" office:value="94804" calcext:value-type="float">
            <text:p>94,804.00</text:p>
          </table:table-cell>
          <table:table-cell table:style-name="ce459" office:value-type="float" office:value="5000" calcext:value-type="float">
            <text:p>5,000.00</text:p>
          </table:table-cell>
          <table:table-cell table:style-name="ce459" table:formula="of:=+[$INVERSION.N6]" office:value-type="float" office:value="21522" calcext:value-type="float">
            <text:p>21,522.00</text:p>
          </table:table-cell>
          <table:table-cell table:style-name="ce459" table:formula="of:=+[.G6]+[.F6]" office:value-type="float" office:value="26522" calcext:value-type="float">
            <text:p>26,522.00</text:p>
          </table:table-cell>
          <table:table-cell table:number-columns-repeated="16376"/>
        </table:table-row>
        <table:table-row table:style-name="ro1">
          <table:table-cell table:style-name="ce392" office:value-type="string" calcext:value-type="string">
            <text:p>I. 1 INVERSION FIJA TANGIBLE</text:p>
          </table:table-cell>
          <table:table-cell/>
          <table:table-cell table:style-name="ce430" office:value-type="string" calcext:value-type="string">
            <text:p>I. 1 INVERSION FIJA TANGIBLE</text:p>
          </table:table-cell>
          <table:table-cell table:style-name="ce444" table:formula="of:=+[$INVERSION.K7]" office:value-type="float" office:value="103076" calcext:value-type="float">
            <text:p>103,076.00</text:p>
          </table:table-cell>
          <table:table-cell table:style-name="ce444" table:formula="of:=+[$INVERSION.L7]" office:value-type="float" office:value="76554" calcext:value-type="float">
            <text:p>76,554.00</text:p>
          </table:table-cell>
          <table:table-cell table:style-name="ce460" office:value-type="float" office:value="5000" calcext:value-type="float">
            <text:p>5,000.00</text:p>
          </table:table-cell>
          <table:table-cell table:style-name="ce459" table:formula="of:=+[$INVERSION.N7]" office:value-type="float" office:value="21522" calcext:value-type="float">
            <text:p>21,522.00</text:p>
          </table:table-cell>
          <table:table-cell table:style-name="ce459" table:formula="of:=+[.G7]+[.F7]" office:value-type="float" office:value="26522" calcext:value-type="float">
            <text:p>26,522.00</text:p>
          </table:table-cell>
          <table:table-cell table:number-columns-repeated="16376"/>
        </table:table-row>
        <table:table-row table:style-name="ro1">
          <table:table-cell table:style-name="ce392" office:value-type="string" calcext:value-type="string">
            <text:p>I.1.1 TERRENOS Y OBRAS CIVILES</text:p>
          </table:table-cell>
          <table:table-cell table:style-name="ce428"/>
          <table:table-cell table:style-name="ce433" office:value-type="string" calcext:value-type="string">
            <text:p>I.1.1 TERRENOS Y OBRAS CIVILES</text:p>
          </table:table-cell>
          <table:table-cell table:style-name="ce444" table:formula="of:=+[$INVERSION.K8]" office:value-type="float" office:value="67368" calcext:value-type="float">
            <text:p>67,368.00</text:p>
          </table:table-cell>
          <table:table-cell table:style-name="ce444" table:formula="of:=+[$INVERSION.L8]" office:value-type="float" office:value="45846" calcext:value-type="float">
            <text:p>45,846.00</text:p>
          </table:table-cell>
          <table:table-cell table:style-name="ce460" office:value-type="float" office:value="0" calcext:value-type="float">
            <text:p>0.00</text:p>
          </table:table-cell>
          <table:table-cell table:style-name="ce459" table:formula="of:=+[$INVERSION.N8]" office:value-type="float" office:value="21522" calcext:value-type="float">
            <text:p>21,522.00</text:p>
          </table:table-cell>
          <table:table-cell table:style-name="ce459" table:formula="of:=+[.G8]+[.F8]" office:value-type="float" office:value="21522" calcext:value-type="float">
            <text:p>21,522.00</text:p>
          </table:table-cell>
          <table:table-cell table:style-name="ce428" table:number-columns-repeated="16376"/>
        </table:table-row>
        <table:table-row table:style-name="ro1">
          <table:table-cell table:style-name="ce392" office:value-type="string" calcext:value-type="string">
            <text:p>I.1.2.MAQUINARIA Y EQUIPOS </text:p>
          </table:table-cell>
          <table:table-cell/>
          <table:table-cell table:style-name="ce433" office:value-type="string" calcext:value-type="string">
            <text:p>I.1.2.MAQUINARIA Y EQUIPOS </text:p>
          </table:table-cell>
          <table:table-cell table:style-name="ce445" table:formula="of:=+[$INVERSION.K41]" office:value-type="float" office:value="30408" calcext:value-type="float">
            <text:p>30,408.00</text:p>
          </table:table-cell>
          <table:table-cell table:style-name="ce445" table:formula="of:=+[$INVERSION.L41]" office:value-type="float" office:value="30408" calcext:value-type="float">
            <text:p>30,408.00</text:p>
          </table:table-cell>
          <table:table-cell table:number-columns-repeated="2" table:style-name="ce445" office:value-type="float" office:value="0" calcext:value-type="float">
            <text:p>0.00</text:p>
          </table:table-cell>
          <table:table-cell table:style-name="ce459" table:formula="of:=+[.G9]+[.F9]" office:value-type="float" office:value="0" calcext:value-type="float">
            <text:p>0.00</text:p>
          </table:table-cell>
          <table:table-cell table:number-columns-repeated="16376"/>
        </table:table-row>
        <table:table-row table:style-name="ro1">
          <table:table-cell table:style-name="ce392" office:value-type="string" calcext:value-type="string">
            <text:p>I.1.3. <text:s/>VEHICULOS</text:p>
          </table:table-cell>
          <table:table-cell/>
          <table:table-cell table:style-name="ce433" office:value-type="string" calcext:value-type="string">
            <text:p>I.1.3. <text:s/>VEHICULOS</text:p>
          </table:table-cell>
          <table:table-cell table:number-columns-repeated="4" table:style-name="ce445" office:value-type="float" office:value="0" calcext:value-type="float">
            <text:p>0.00</text:p>
          </table:table-cell>
          <table:table-cell table:style-name="ce459" table:formula="of:=+[.G10]+[.F10]" office:value-type="float" office:value="0" calcext:value-type="float">
            <text:p>0.00</text:p>
          </table:table-cell>
          <table:table-cell table:number-columns-repeated="16376"/>
        </table:table-row>
        <table:table-row table:style-name="ro1">
          <table:table-cell table:style-name="ce392" office:value-type="string" calcext:value-type="string">
            <text:p>I.1.4. MUEBLES Y ENSERES</text:p>
          </table:table-cell>
          <table:table-cell/>
          <table:table-cell table:style-name="ce433" office:value-type="string" calcext:value-type="string">
            <text:p>I.1.4. MUEBLES Y ENSERES</text:p>
          </table:table-cell>
          <table:table-cell table:style-name="ce445" table:formula="of:=+[$INVERSION.K57]" office:value-type="float" office:value="5300" calcext:value-type="float">
            <text:p>5,300.00</text:p>
          </table:table-cell>
          <table:table-cell table:style-name="ce445" table:formula="of:=+[$INVERSION.L57]" office:value-type="float" office:value="300" calcext:value-type="float">
            <text:p>300.00</text:p>
          </table:table-cell>
          <table:table-cell table:style-name="ce445" office:value-type="float" office:value="5000" calcext:value-type="float">
            <text:p>5,000.00</text:p>
          </table:table-cell>
          <table:table-cell table:style-name="ce445" office:value-type="float" office:value="0" calcext:value-type="float">
            <text:p>0.00</text:p>
          </table:table-cell>
          <table:table-cell table:style-name="ce459" table:formula="of:=+[.G11]+[.F11]" office:value-type="float" office:value="5000" calcext:value-type="float">
            <text:p>5,000.00</text:p>
          </table:table-cell>
          <table:table-cell table:number-columns-repeated="16376"/>
        </table:table-row>
        <table:table-row table:style-name="ro1">
          <table:table-cell table:style-name="ce392" office:value-type="string" calcext:value-type="string">
            <text:p>I.2. INVERSION FIJA INTANGIBLE</text:p>
          </table:table-cell>
          <table:table-cell/>
          <table:table-cell table:style-name="ce430" office:value-type="string" calcext:value-type="string">
            <text:p>I.2. INVERSION FIJA INTANGIBLE</text:p>
          </table:table-cell>
          <table:table-cell table:style-name="ce445" table:formula="of:=+[$INVERSION.K61]" office:value-type="float" office:value="18250" calcext:value-type="float">
            <text:p>18,250.00</text:p>
          </table:table-cell>
          <table:table-cell table:style-name="ce445" table:formula="of:=+[$INVERSION.L61]" office:value-type="float" office:value="18250" calcext:value-type="float">
            <text:p>18,250.00</text:p>
          </table:table-cell>
          <table:table-cell table:number-columns-repeated="2" table:style-name="ce460" office:value-type="float" office:value="0" calcext:value-type="float">
            <text:p>0.00</text:p>
          </table:table-cell>
          <table:table-cell table:style-name="ce459" table:formula="of:=+[.G12]+[.F12]" office:value-type="float" office:value="0" calcext:value-type="float">
            <text:p>0.00</text:p>
          </table:table-cell>
          <table:table-cell table:number-columns-repeated="16376"/>
        </table:table-row>
        <table:table-row table:style-name="ro1">
          <table:table-cell table:style-name="ce391" office:value-type="string" calcext:value-type="string">
            <text:p>II. CAPITAL DE TRABAJO</text:p>
          </table:table-cell>
          <table:table-cell/>
          <table:table-cell table:style-name="ce430" office:value-type="string" calcext:value-type="string">
            <text:p>II. CAPITAL DE TRABAJO</text:p>
          </table:table-cell>
          <table:table-cell table:style-name="ce445" table:formula="of:=+[$INVERSION.K65]" office:value-type="float" office:value="4173.44538552312" calcext:value-type="float">
            <text:p>4,173.45</text:p>
          </table:table-cell>
          <table:table-cell table:style-name="ce445" table:number-columns-repeated="2"/>
          <table:table-cell table:style-name="ce445" table:formula="of:=+[$INVERSION.N65]" office:value-type="float" office:value="4173.44538552312" calcext:value-type="float">
            <text:p>4,173.45</text:p>
          </table:table-cell>
          <table:table-cell table:style-name="ce459" table:formula="of:=+[.G13]+[.F13]" office:value-type="float" office:value="4173.44538552312" calcext:value-type="float">
            <text:p>4,173.45</text:p>
          </table:table-cell>
          <table:table-cell table:number-columns-repeated="16376"/>
        </table:table-row>
        <table:table-row table:style-name="ro1">
          <table:table-cell table:style-name="ce391" office:value-type="string" calcext:value-type="string">
            <text:p>III. GASTOS GENERALES (7.00 %)</text:p>
          </table:table-cell>
          <table:table-cell/>
          <table:table-cell table:style-name="ce430" office:value-type="string" calcext:value-type="string">
            <text:p>III. GASTOS GENERALES (8.00 %)</text:p>
          </table:table-cell>
          <table:table-cell table:style-name="ce445" table:formula="of:=+[$INVERSION.K66]" office:value-type="float" office:value="9706.08" calcext:value-type="float">
            <text:p>9,706.08</text:p>
          </table:table-cell>
          <table:table-cell table:style-name="ce457" table:formula="of:=+[.D14]" office:value-type="float" office:value="9706.08" calcext:value-type="float">
            <text:p>9,706.08</text:p>
          </table:table-cell>
          <table:table-cell table:style-name="ce464"/>
          <table:table-cell table:style-name="ce468"/>
          <table:table-cell table:style-name="ce457"/>
          <table:table-cell table:number-columns-repeated="16376"/>
        </table:table-row>
        <table:table-row table:style-name="ro1">
          <table:table-cell table:style-name="ce391" office:value-type="string" calcext:value-type="string">
            <text:p>IV. <text:s/>GASTOS DE SUPERVISION (3.0%)</text:p>
          </table:table-cell>
          <table:table-cell/>
          <table:table-cell table:style-name="ce430" office:value-type="string" calcext:value-type="string">
            <text:p>IV. <text:s/>GASTOS DE SUPERVISION (4.0%)</text:p>
          </table:table-cell>
          <table:table-cell table:style-name="ce445" table:formula="of:=+[$INVERSION.K67]" office:value-type="float" office:value="4853.04" calcext:value-type="float">
            <text:p>4,853.04</text:p>
          </table:table-cell>
          <table:table-cell table:style-name="ce457" table:formula="of:=+[.D15]" office:value-type="float" office:value="4853.04" calcext:value-type="float">
            <text:p>4,853.04</text:p>
          </table:table-cell>
          <table:table-cell table:style-name="ce464"/>
          <table:table-cell table:style-name="ce468"/>
          <table:table-cell table:style-name="ce457"/>
          <table:table-cell table:number-columns-repeated="16376"/>
        </table:table-row>
        <table:table-row table:style-name="ro1">
          <table:table-cell table:style-name="ce397" office:value-type="string" calcext:value-type="string">
            <text:p>TOTAL INVERSIÓN</text:p>
          </table:table-cell>
          <table:table-cell/>
          <table:table-cell table:style-name="ce472" office:value-type="string" calcext:value-type="string">
            <text:p>TOTAL INVERSIÓN</text:p>
          </table:table-cell>
          <table:table-cell table:style-name="ce452" table:formula="of:=+[.D6]+[.D13]+[.D14]+[.D15]" office:value-type="float" office:value="140058.565385523" calcext:value-type="float">
            <text:p>140,058.57</text:p>
          </table:table-cell>
          <table:table-cell table:style-name="ce452" table:formula="of:=+[.E6]+[.E13]+[.E14]+[.E15]" office:value-type="float" office:value="109363.12" calcext:value-type="float">
            <text:p>109,363.12</text:p>
          </table:table-cell>
          <table:table-cell table:style-name="ce452" table:formula="of:=+[.F6]+[.F13]+[.F14]+[.F15]" office:value-type="float" office:value="5000" calcext:value-type="float">
            <text:p>5,000.00</text:p>
          </table:table-cell>
          <table:table-cell table:style-name="ce452" table:formula="of:=+[.G6]+[.G13]+[.G14]+[.G15]" office:value-type="float" office:value="25695.4453855231" calcext:value-type="float">
            <text:p>25,695.45</text:p>
          </table:table-cell>
          <table:table-cell table:style-name="ce452" table:formula="of:=+[.H6]+[.H13]+[.H14]+[.H15]" office:value-type="float" office:value="30695.4453855231" calcext:value-type="float">
            <text:p>30,695.45</text:p>
          </table:table-cell>
          <table:table-cell table:style-name="ce421"/>
          <table:table-cell table:number-columns-repeated="16375"/>
        </table:table-row>
        <table:table-row table:style-name="ro1">
          <table:table-cell table:number-columns-repeated="2"/>
          <table:table-cell table:style-name="ce353" office:value-type="string" calcext:value-type="string">
            <text:p>PORCENTAJE</text:p>
          </table:table-cell>
          <table:table-cell table:style-name="ce453" office:value-type="percentage" office:value="1" calcext:value-type="percentage">
            <text:p>100.00 %</text:p>
          </table:table-cell>
          <table:table-cell table:style-name="ce453" table:formula="of:=+[.E16]/[.D16]" office:value-type="percentage" office:value="0.780838499230438" calcext:value-type="percentage">
            <text:p>78.08 %</text:p>
          </table:table-cell>
          <table:table-cell table:style-name="ce453" table:formula="of:=+[.F16]/[.H16]" office:value-type="percentage" office:value="0.162890615764062" calcext:value-type="percentage">
            <text:p>16.29 %</text:p>
          </table:table-cell>
          <table:table-cell table:style-name="ce453" table:formula="of:=+[.G16]/[.H16]" office:value-type="percentage" office:value="0.837109384235938" calcext:value-type="percentage">
            <text:p>83.71 %</text:p>
          </table:table-cell>
          <table:table-cell table:style-name="ce453" table:formula="of:=+[.H16]/[.D16]" office:value-type="percentage" office:value="0.219161500769562" calcext:value-type="percentage">
            <text:p>21.92 %</text:p>
          </table:table-cell>
          <table:table-cell table:style-name="ce471"/>
          <table:table-cell table:number-columns-repeated="16375"/>
        </table:table-row>
        <table:table-row table:style-name="ro1">
          <table:table-cell table:number-columns-repeated="3"/>
          <table:table-cell table:style-name="ce454" table:formula="of:=+[$INVERSION.K68]" office:value-type="float" office:value="140058.565385523" calcext:value-type="float">
            <text:p>140,058.57</text:p>
          </table:table-cell>
          <table:table-cell table:style-name="ce454" table:formula="of:=+[$INVERSION.L68]" office:value-type="float" office:value="109363.12" calcext:value-type="float">
            <text:p>109,363.12</text:p>
          </table:table-cell>
          <table:table-cell table:style-name="ce419" table:formula="of:=+[$INVERSION.M68]" office:value-type="float" office:value="5000" calcext:value-type="float">
            <text:p>5,000.00</text:p>
          </table:table-cell>
          <table:table-cell table:style-name="ce454" table:formula="of:=+[$INVERSION.N68]" office:value-type="float" office:value="25695.4453855231" calcext:value-type="float">
            <text:p>25,695.45</text:p>
          </table:table-cell>
          <table:table-cell table:style-name="ce424" table:formula="of:=+[$INVERSION.O68]" office:value-type="float" office:value="30695.4453855231" calcext:value-type="float">
            <text:p>30,695.45</text:p>
          </table:table-cell>
          <table:table-cell table:number-columns-repeated="16376"/>
        </table:table-row>
        <table:table-row table:style-name="ro1">
          <table:table-cell table:number-columns-repeated="3"/>
          <table:table-cell table:style-name="ce455" table:formula="of:=+[.D18]-[.D16]" office:value-type="float" office:value="0" calcext:value-type="float">
            <text:p>0.00</text:p>
          </table:table-cell>
          <table:table-cell table:style-name="ce473" table:formula="of:=+[.E18]-[.E16]" office:value-type="float" office:value="0" calcext:value-type="float">
            <text:p>0.00</text:p>
          </table:table-cell>
          <table:table-cell table:style-name="ce473" table:formula="of:=+[.F18]-[.F16]" office:value-type="float" office:value="0" calcext:value-type="float">
            <text:p>0.00</text:p>
          </table:table-cell>
          <table:table-cell table:style-name="ce473" table:formula="of:=+[.G18]-[.G16]" office:value-type="float" office:value="0" calcext:value-type="float">
            <text:p>0.00</text:p>
          </table:table-cell>
          <table:table-cell table:style-name="ce473" table:formula="of:=+[.H18]-[.H16]" office:value-type="float" office:value="0" calcext:value-type="float">
            <text:p>0.00</text:p>
          </table:table-cell>
          <table:table-cell table:number-columns-repeated="16376"/>
        </table:table-row>
        <table:table-row table:style-name="ro1">
          <table:table-cell table:number-columns-repeated="16384"/>
        </table:table-row>
        <table:table-row table:style-name="ro1">
          <table:table-cell table:number-columns-repeated="5"/>
          <table:table-cell table:style-name="ce419"/>
          <table:table-cell table:number-columns-repeated="16378"/>
        </table:table-row>
        <table:table-row table:style-name="ro1" table:number-rows-repeated="1048554">
          <table:table-cell table:number-columns-repeated="16384"/>
        </table:table-row>
        <table:table-row table:style-name="ro1">
          <table:table-cell table:number-columns-repeated="16384"/>
        </table:table-row>
        <table:named-expressions>
          <table:named-range table:name="_xlnm.Print_Area" table:base-cell-address="$POBLACION.$A$1" table:cell-range-address="$'RESUM INVER'.$C$1:.$H$17" table:range-usable-as="print-range"/>
        </table:named-expressions>
      </table:table>
      <table:table table:name="CRONOG" table:style-name="ta13" table:print-ranges="CRONOG.A2:CRONOG.H39">
        <table:table-column table:style-name="co77" table:default-cell-style-name="ce474"/>
        <table:table-column table:style-name="co29" table:number-columns-repeated="5" table:default-cell-style-name="ce474"/>
        <table:table-column table:style-name="co10" table:default-cell-style-name="ce489"/>
        <table:table-column table:style-name="co51" table:default-cell-style-name="ce497"/>
        <table:table-column table:style-name="co78" table:default-cell-style-name="ce474"/>
        <table:table-column table:style-name="co79" table:default-cell-style-name="ce474"/>
        <table:table-column table:style-name="co6" table:default-cell-style-name="ce474"/>
        <table:table-column table:style-name="co80" table:default-cell-style-name="ce474"/>
        <table:table-column table:style-name="co26" table:default-cell-style-name="ce474"/>
        <table:table-column table:style-name="co80" table:default-cell-style-name="ce474"/>
        <table:table-column table:style-name="co29" table:default-cell-style-name="ce474"/>
        <table:table-column table:style-name="co72" table:default-cell-style-name="ce474"/>
        <table:table-column table:style-name="co81" table:number-columns-repeated="2" table:default-cell-style-name="ce474"/>
        <table:table-column table:style-name="co82" table:default-cell-style-name="ce474"/>
        <table:table-column table:style-name="co83" table:default-cell-style-name="ce474"/>
        <table:table-column table:style-name="co31" table:default-cell-style-name="ce474"/>
        <table:table-column table:style-name="co29" table:default-cell-style-name="ce474"/>
        <table:table-column table:style-name="co48" table:default-cell-style-name="ce474"/>
        <table:table-column table:style-name="co81" table:default-cell-style-name="ce474"/>
        <table:table-column table:style-name="co73" table:default-cell-style-name="ce474"/>
        <table:table-column table:style-name="co32" table:default-cell-style-name="ce474"/>
        <table:table-column table:style-name="co30" table:default-cell-style-name="ce474"/>
        <table:table-column table:style-name="co36" table:default-cell-style-name="ce474"/>
        <table:table-column table:style-name="co8" table:default-cell-style-name="ce474"/>
        <table:table-column table:style-name="co71" table:default-cell-style-name="ce474"/>
        <table:table-column table:style-name="co12" table:default-cell-style-name="ce474"/>
        <table:table-column table:style-name="co38" table:default-cell-style-name="ce474"/>
        <table:table-column table:style-name="co1" table:number-columns-repeated="16352" table:default-cell-style-name="ce474"/>
        <table:table-row table:style-name="ro26">
          <table:table-cell table:number-columns-repeated="16384"/>
        </table:table-row>
        <table:table-row table:style-name="ro26">
          <table:table-cell table:style-name="ce475" office:value-type="string" calcext:value-type="string" table:number-columns-spanned="8" table:number-rows-spanned="1">
            <text:p><text:s text:c="45"/>CRONOGRAMA DE EJECUCION FINANCIERO</text:p>
          </table:table-cell>
          <table:covered-table-cell table:number-columns-repeated="7" table:style-name="ce475"/>
          <table:table-cell table:style-name="ce504"/>
          <table:table-cell table:number-columns-repeated="16375"/>
        </table:table-row>
        <table:table-row table:style-name="ro35">
          <table:table-cell table:style-name="ce64" office:value-type="string" calcext:value-type="string" table:number-columns-spanned="1" table:number-rows-spanned="3">
            <text:p>COMPONENTES</text:p>
          </table:table-cell>
          <table:table-cell table:style-name="ce64" office:value-type="string" calcext:value-type="string" table:number-columns-spanned="5" table:number-rows-spanned="1">
            <text:p>EJECUCIÓN</text:p>
          </table:table-cell>
          <table:covered-table-cell table:number-columns-repeated="3" table:style-name="ce486"/>
          <table:covered-table-cell table:style-name="ce488"/>
          <table:table-cell table:style-name="ce488" office:value-type="string" calcext:value-type="string">
            <text:p>OPERACIÓN</text:p>
          </table:table-cell>
          <table:table-cell table:style-name="ce498" office:value-type="string" office:string-value="TOTAL" calcext:value-type="string" table:number-columns-spanned="1" table:number-rows-spanned="3">
            <text:p><text:s/>TOTAL </text:p>
          </table:table-cell>
          <table:table-cell table:style-name="ce504"/>
          <table:table-cell table:number-columns-repeated="16375"/>
        </table:table-row>
        <table:table-row table:style-name="ro35">
          <table:covered-table-cell table:style-name="ce64"/>
          <table:table-cell table:style-name="ce64" office:value-type="string" calcext:value-type="string" table:number-columns-spanned="5" table:number-rows-spanned="1">
            <text:p>MESES</text:p>
          </table:table-cell>
          <table:covered-table-cell table:number-columns-repeated="3" table:style-name="ce486"/>
          <table:covered-table-cell table:style-name="ce488"/>
          <table:table-cell table:style-name="ce488" office:value-type="string" calcext:value-type="string">
            <text:p>AÑOS </text:p>
          </table:table-cell>
          <table:covered-table-cell table:style-name="ce498"/>
          <table:table-cell table:style-name="ce504"/>
          <table:table-cell table:number-columns-repeated="16375"/>
        </table:table-row>
        <table:table-row table:style-name="ro14">
          <table:covered-table-cell table:style-name="ce64"/>
          <table:table-cell table:style-name="ce64" office:value-type="float" office:value="1" calcext:value-type="float">
            <text:p>1</text:p>
          </table:table-cell>
          <table:table-cell table:style-name="ce64" office:value-type="float" office:value="2" calcext:value-type="float">
            <text:p>2</text:p>
          </table:table-cell>
          <table:table-cell table:style-name="ce64" office:value-type="float" office:value="3" calcext:value-type="float">
            <text:p>3</text:p>
          </table:table-cell>
          <table:table-cell table:style-name="ce64" office:value-type="float" office:value="4" calcext:value-type="float">
            <text:p>4</text:p>
          </table:table-cell>
          <table:table-cell table:style-name="ce64" office:value-type="float" office:value="5" calcext:value-type="float">
            <text:p>5</text:p>
          </table:table-cell>
          <table:table-cell table:style-name="ce64" office:value-type="string" calcext:value-type="string">
            <text:p>1 AL 5</text:p>
          </table:table-cell>
          <table:covered-table-cell table:style-name="ce498"/>
          <table:table-cell table:style-name="ce504"/>
          <table:table-cell table:number-columns-repeated="16375"/>
        </table:table-row>
        <table:table-row table:style-name="ro26">
          <table:table-cell table:style-name="ce476" office:value-type="string" calcext:value-type="string">
            <text:p>I.INVERSION FIJA </text:p>
          </table:table-cell>
          <table:table-cell table:style-name="ce476" table:number-columns-repeated="5"/>
          <table:table-cell table:style-name="ce490"/>
          <table:table-cell table:style-name="ce499" table:formula="of:=[.H7]+[.H12]" office:value-type="float" office:value="121326" calcext:value-type="float">
            <text:p><text:s/>121,326.00 </text:p>
          </table:table-cell>
          <table:table-cell table:style-name="ce504"/>
          <table:table-cell table:number-columns-repeated="16375"/>
        </table:table-row>
        <table:table-row table:style-name="ro26">
          <table:table-cell table:style-name="ce477" office:value-type="string" calcext:value-type="string">
            <text:p><text:s text:c="2"/>I.1. INVERSION FIJA TANGIBLE</text:p>
          </table:table-cell>
          <table:table-cell table:style-name="ce477" table:number-columns-repeated="5"/>
          <table:table-cell table:style-name="ce491"/>
          <table:table-cell table:style-name="ce500" table:formula="of:=SUM([.H8:.H11])" office:value-type="float" office:value="103076" calcext:value-type="float">
            <text:p><text:s/>103,076.00 </text:p>
          </table:table-cell>
          <table:table-cell table:number-columns-repeated="16376"/>
        </table:table-row>
        <table:table-row table:style-name="ro26">
          <table:table-cell table:style-name="ce477" office:value-type="string" calcext:value-type="string">
            <text:p><text:s text:c="5"/>I.1.1. TERRENOS Y OBRAS CIVILES</text:p>
          </table:table-cell>
          <table:table-cell table:style-name="ce482" table:formula="of:=[$INVERSION.$F$8]/5" office:value-type="float" office:value="13473.6" calcext:value-type="float">
            <text:p>13,473.60</text:p>
          </table:table-cell>
          <table:table-cell table:style-name="ce482" table:formula="of:=+[.B8]" office:value-type="float" office:value="13473.6" calcext:value-type="float">
            <text:p>13,473.60</text:p>
          </table:table-cell>
          <table:table-cell table:style-name="ce482" table:formula="of:=+[.C8]" office:value-type="float" office:value="13473.6" calcext:value-type="float">
            <text:p>13,473.60</text:p>
          </table:table-cell>
          <table:table-cell table:style-name="ce482" table:formula="of:=+[.D8]" office:value-type="float" office:value="13473.6" calcext:value-type="float">
            <text:p>13,473.60</text:p>
          </table:table-cell>
          <table:table-cell table:style-name="ce482" table:formula="of:=+[.E8]" office:value-type="float" office:value="13473.6" calcext:value-type="float">
            <text:p>13,473.60</text:p>
          </table:table-cell>
          <table:table-cell table:style-name="ce492"/>
          <table:table-cell table:style-name="ce500" table:formula="of:=SUM([.B8:.G8])" office:value-type="float" office:value="67368" calcext:value-type="float">
            <text:p><text:s/>67,368.00 </text:p>
          </table:table-cell>
          <table:table-cell table:number-columns-repeated="16376"/>
        </table:table-row>
        <table:table-row table:style-name="ro26">
          <table:table-cell table:style-name="ce477" office:value-type="string" calcext:value-type="string">
            <text:p><text:s text:c="5"/>I.1.2. MAQUINARIA Y EQUIPO</text:p>
          </table:table-cell>
          <table:table-cell table:style-name="ce482"/>
          <table:table-cell table:style-name="ce482" table:formula="of:=[$INVERSION.$F$9]/3" office:value-type="float" office:value="10136" calcext:value-type="float">
            <text:p>10,136.00</text:p>
          </table:table-cell>
          <table:table-cell table:style-name="ce482" table:formula="of:=+[.C9]" office:value-type="float" office:value="10136" calcext:value-type="float">
            <text:p>10,136.00</text:p>
          </table:table-cell>
          <table:table-cell table:style-name="ce482" table:formula="of:=+[.D9]" office:value-type="float" office:value="10136" calcext:value-type="float">
            <text:p>10,136.00</text:p>
          </table:table-cell>
          <table:table-cell table:style-name="ce482"/>
          <table:table-cell table:style-name="ce492"/>
          <table:table-cell table:style-name="ce500" table:formula="of:=SUM([.B9:.G9])" office:value-type="float" office:value="30408" calcext:value-type="float">
            <text:p><text:s/>30,408.00 </text:p>
          </table:table-cell>
          <table:table-cell table:number-columns-repeated="16376"/>
        </table:table-row>
        <table:table-row table:style-name="ro26">
          <table:table-cell table:style-name="ce477" office:value-type="string" calcext:value-type="string">
            <text:p><text:s text:c="5"/>I.1.3. VEHICULOS</text:p>
          </table:table-cell>
          <table:table-cell table:style-name="ce482" table:number-columns-repeated="5"/>
          <table:table-cell table:style-name="ce492"/>
          <table:table-cell table:style-name="ce500" table:formula="of:=SUM([.B10:.G10])" office:value-type="float" office:value="0" calcext:value-type="float">
            <text:p><text:s/>- <text:s text:c="2"/></text:p>
          </table:table-cell>
          <table:table-cell table:number-columns-repeated="16376"/>
        </table:table-row>
        <table:table-row table:style-name="ro26">
          <table:table-cell table:style-name="ce477" office:value-type="string" calcext:value-type="string">
            <text:p><text:s text:c="5"/>I.1.4. MUEBLES Y ENSERES</text:p>
          </table:table-cell>
          <table:table-cell table:style-name="ce482" table:number-columns-repeated="4"/>
          <table:table-cell table:style-name="ce482" table:formula="of:=[$INVERSION.F11]" office:value-type="float" office:value="5300" calcext:value-type="float">
            <text:p>5,300.00</text:p>
          </table:table-cell>
          <table:table-cell table:style-name="ce492"/>
          <table:table-cell table:style-name="ce500" table:formula="of:=SUM([.B11:.G11])" office:value-type="float" office:value="5300" calcext:value-type="float">
            <text:p><text:s/>5,300.00 </text:p>
          </table:table-cell>
          <table:table-cell table:number-columns-repeated="16376"/>
        </table:table-row>
        <table:table-row table:style-name="ro26">
          <table:table-cell table:style-name="ce477" office:value-type="string" calcext:value-type="string">
            <text:p><text:s text:c="2"/>I.2. INVERSION FIJA INTANGIBLE</text:p>
          </table:table-cell>
          <table:table-cell table:style-name="ce482" table:formula="of:=[$INVERSION.F12]/5" office:value-type="float" office:value="3650" calcext:value-type="float">
            <text:p>3,650.00</text:p>
          </table:table-cell>
          <table:table-cell table:style-name="ce482" table:formula="of:=[.B12]" office:value-type="float" office:value="3650" calcext:value-type="float">
            <text:p>3,650.00</text:p>
          </table:table-cell>
          <table:table-cell table:style-name="ce482" table:formula="of:=[.C12]" office:value-type="float" office:value="3650" calcext:value-type="float">
            <text:p>3,650.00</text:p>
          </table:table-cell>
          <table:table-cell table:style-name="ce482" table:formula="of:=[.D12]" office:value-type="float" office:value="3650" calcext:value-type="float">
            <text:p>3,650.00</text:p>
          </table:table-cell>
          <table:table-cell table:style-name="ce482" table:formula="of:=[.D12]" office:value-type="float" office:value="3650" calcext:value-type="float">
            <text:p>3,650.00</text:p>
          </table:table-cell>
          <table:table-cell table:style-name="ce492"/>
          <table:table-cell table:style-name="ce500" table:formula="of:=SUM([.B12:.G12])" office:value-type="float" office:value="18250" calcext:value-type="float">
            <text:p><text:s/>18,250.00 </text:p>
          </table:table-cell>
          <table:table-cell table:number-columns-repeated="16376"/>
        </table:table-row>
        <table:table-row table:style-name="ro26">
          <table:table-cell table:style-name="ce477" office:value-type="string" calcext:value-type="string">
            <text:p>II. CAPITAL DE TRABAJO</text:p>
          </table:table-cell>
          <table:table-cell table:style-name="ce482" table:number-columns-repeated="5"/>
          <table:table-cell table:style-name="ce493" table:formula="of:=[$INVERSION.$F$13]" office:value-type="float" office:value="4173.44538552312" calcext:value-type="float">
            <text:p>4,173.45</text:p>
          </table:table-cell>
          <table:table-cell table:style-name="ce500" table:formula="of:=SUM([.B13:.G13])" office:value-type="float" office:value="4173.44538552312" calcext:value-type="float">
            <text:p><text:s/>4,173.45 </text:p>
          </table:table-cell>
          <table:table-cell table:number-columns-repeated="16376"/>
        </table:table-row>
        <table:table-row table:style-name="ro26">
          <table:table-cell table:style-name="ce477" table:formula="of:=[$INVERSION.E14]" office:value-type="string" office:string-value="III. GASTOS GENERALES ( 8.0 % )IF" calcext:value-type="string">
            <text:p>III. GASTOS GENERALES ( 8.0 % )IF</text:p>
          </table:table-cell>
          <table:table-cell table:style-name="ce482" table:formula="of:=[$INVERSION.$F$14]/5" office:value-type="float" office:value="1941.216" calcext:value-type="float">
            <text:p>1,941.22</text:p>
          </table:table-cell>
          <table:table-cell table:style-name="ce482" table:formula="of:=+[.B14]" office:value-type="float" office:value="1941.216" calcext:value-type="float">
            <text:p>1,941.22</text:p>
          </table:table-cell>
          <table:table-cell table:style-name="ce482" table:formula="of:=+[.C14]" office:value-type="float" office:value="1941.216" calcext:value-type="float">
            <text:p>1,941.22</text:p>
          </table:table-cell>
          <table:table-cell table:style-name="ce482" table:formula="of:=+[.D14]" office:value-type="float" office:value="1941.216" calcext:value-type="float">
            <text:p>1,941.22</text:p>
          </table:table-cell>
          <table:table-cell table:style-name="ce482" table:formula="of:=+[.E14]" office:value-type="float" office:value="1941.216" calcext:value-type="float">
            <text:p>1,941.22</text:p>
          </table:table-cell>
          <table:table-cell table:style-name="ce492"/>
          <table:table-cell table:style-name="ce500" table:formula="of:=SUM([.B14:.G14])" office:value-type="float" office:value="9706.08" calcext:value-type="float">
            <text:p><text:s/>9,706.08 </text:p>
          </table:table-cell>
          <table:table-cell table:number-columns-repeated="16376"/>
        </table:table-row>
        <table:table-row table:style-name="ro26">
          <table:table-cell table:style-name="ce477" table:formula="of:=[$INVERSION.E15]" office:value-type="string" office:string-value="IV. GASTOS DE SUPERVISION (4.%) IF" calcext:value-type="string">
            <text:p>IV. GASTOS DE SUPERVISION (4.%) IF</text:p>
          </table:table-cell>
          <table:table-cell table:style-name="ce482" table:formula="of:=[$INVERSION.$F$15]/5" office:value-type="float" office:value="970.608" calcext:value-type="float">
            <text:p>970.61</text:p>
          </table:table-cell>
          <table:table-cell table:style-name="ce482" table:formula="of:=+[.B15]" office:value-type="float" office:value="970.608" calcext:value-type="float">
            <text:p>970.61</text:p>
          </table:table-cell>
          <table:table-cell table:style-name="ce482" table:formula="of:=+[.C15]" office:value-type="float" office:value="970.608" calcext:value-type="float">
            <text:p>970.61</text:p>
          </table:table-cell>
          <table:table-cell table:style-name="ce482" table:formula="of:=+[.D15]" office:value-type="float" office:value="970.608" calcext:value-type="float">
            <text:p>970.61</text:p>
          </table:table-cell>
          <table:table-cell table:style-name="ce482" table:formula="of:=+[.E15]" office:value-type="float" office:value="970.608" calcext:value-type="float">
            <text:p>970.61</text:p>
          </table:table-cell>
          <table:table-cell table:style-name="ce492"/>
          <table:table-cell table:style-name="ce500" table:formula="of:=SUM([.B15:.G15])" office:value-type="float" office:value="4853.04" calcext:value-type="float">
            <text:p><text:s/>4,853.04 </text:p>
          </table:table-cell>
          <table:table-cell table:number-columns-repeated="16376"/>
        </table:table-row>
        <table:table-row table:style-name="ro26">
          <table:table-cell table:style-name="ce478" office:value-type="string" calcext:value-type="string">
            <text:p>TOTAL INVERSIÒN</text:p>
          </table:table-cell>
          <table:table-cell table:style-name="ce483" table:formula="of:=SUM([.B6:.B15])" office:value-type="float" office:value="20035.424" calcext:value-type="float">
            <text:p>20,035.42</text:p>
          </table:table-cell>
          <table:table-cell table:style-name="ce483" table:formula="of:=SUM([.C6:.C15])" office:value-type="float" office:value="30171.424" calcext:value-type="float">
            <text:p>30,171.42</text:p>
          </table:table-cell>
          <table:table-cell table:style-name="ce483" table:formula="of:=SUM([.D6:.D15])" office:value-type="float" office:value="30171.424" calcext:value-type="float">
            <text:p>30,171.42</text:p>
          </table:table-cell>
          <table:table-cell table:style-name="ce483" table:formula="of:=SUM([.E6:.E15])" office:value-type="float" office:value="30171.424" calcext:value-type="float">
            <text:p>30,171.42</text:p>
          </table:table-cell>
          <table:table-cell table:style-name="ce483" table:formula="of:=SUM([.F6:.F15])" office:value-type="float" office:value="25335.424" calcext:value-type="float">
            <text:p>25,335.42</text:p>
          </table:table-cell>
          <table:table-cell table:style-name="ce494" table:formula="of:=SUM([.G6:.G15])" office:value-type="float" office:value="4173.44538552312" calcext:value-type="float">
            <text:p>4,173.45</text:p>
          </table:table-cell>
          <table:table-cell table:style-name="ce501" table:formula="of:=[.H14]+[.H13]+[.H6]+[.H15]" office:value-type="float" office:value="140058.565385523" calcext:value-type="float">
            <text:p><text:s/>140,058.57 </text:p>
          </table:table-cell>
          <table:table-cell table:style-name="ce505" table:formula="of:=+[$INVERSION.K68]" office:value-type="float" office:value="140058.565385523" calcext:value-type="float">
            <text:p>140,058.57</text:p>
          </table:table-cell>
          <table:table-cell table:number-columns-repeated="16375"/>
        </table:table-row>
        <table:table-row table:style-name="ro26">
          <table:table-cell table:style-name="ce479"/>
          <table:table-cell table:number-columns-repeated="7"/>
          <table:table-cell table:style-name="ce506" table:formula="of:=+[.I16]-[.H16]" office:value-type="float" office:value="0" calcext:value-type="float">
            <text:p><text:s/>- <text:s text:c="2"/></text:p>
          </table:table-cell>
          <table:table-cell table:number-columns-repeated="16375"/>
        </table:table-row>
        <table:table-row table:style-name="ro26">
          <table:table-cell table:number-columns-repeated="3"/>
          <table:table-cell table:style-name="ce487" table:number-columns-repeated="2"/>
          <table:table-cell table:number-columns-repeated="16379"/>
        </table:table-row>
        <table:table-row table:style-name="ro26">
          <table:table-cell table:style-name="ce480" office:value-type="string" calcext:value-type="string" table:number-columns-spanned="2" table:number-rows-spanned="1">
            <text:p>Ejecucion financiera en la implementacion</text:p>
          </table:table-cell>
          <table:covered-table-cell table:style-name="ce484"/>
          <table:table-cell table:number-columns-repeated="5"/>
          <table:table-cell table:formula="of:=[.H16]-[.H13]" office:value-type="float" office:value="135885.12" calcext:value-type="float">
            <text:p><text:s/>135,885.12 </text:p>
          </table:table-cell>
          <table:table-cell table:number-columns-repeated="16376"/>
        </table:table-row>
        <table:table-row table:style-name="ro26">
          <table:table-cell office:value-type="string" calcext:value-type="string">
            <text:p>capital de trabajo</text:p>
          </table:table-cell>
          <table:table-cell table:number-columns-repeated="6"/>
          <table:table-cell table:formula="of:=[.H13]" office:value-type="float" office:value="4173.44538552312" calcext:value-type="float">
            <text:p><text:s/>4,173.45 </text:p>
          </table:table-cell>
          <table:table-cell table:number-columns-repeated="16376"/>
        </table:table-row>
        <table:table-row table:style-name="ro26">
          <table:table-cell table:style-name="ce479" office:value-type="string" calcext:value-type="string">
            <text:p>TOTAL INVERSION</text:p>
          </table:table-cell>
          <table:table-cell table:style-name="ce479" table:number-columns-repeated="5"/>
          <table:table-cell table:style-name="ce495"/>
          <table:table-cell table:style-name="ce502" table:formula="of:=SUM([.H19:.H20])" office:value-type="float" office:value="140058.565385523" calcext:value-type="float">
            <text:p><text:s/>140,058.57 </text:p>
          </table:table-cell>
          <table:table-cell table:number-columns-repeated="16376"/>
        </table:table-row>
        <table:table-row table:style-name="ro26" table:number-rows-repeated="3">
          <table:table-cell table:number-columns-repeated="16384"/>
        </table:table-row>
        <table:table-row table:style-name="ro26">
          <table:table-cell table:style-name="ce481" office:value-type="string" calcext:value-type="string" table:number-columns-spanned="8" table:number-rows-spanned="1">
            <text:p><text:s text:c="45"/>CRONOGRAMA DE EJECUCION FISICO</text:p>
          </table:table-cell>
          <table:covered-table-cell table:number-columns-repeated="7" table:style-name="ce481"/>
          <table:table-cell table:number-columns-repeated="16376"/>
        </table:table-row>
        <table:table-row table:style-name="ro26">
          <table:table-cell table:style-name="ce64" office:value-type="string" calcext:value-type="string" table:number-columns-spanned="1" table:number-rows-spanned="3">
            <text:p>COMPONENTES</text:p>
          </table:table-cell>
          <table:table-cell table:style-name="ce64" office:value-type="string" calcext:value-type="string" table:number-columns-spanned="5" table:number-rows-spanned="1">
            <text:p>EJECUCIÓN</text:p>
          </table:table-cell>
          <table:covered-table-cell table:number-columns-repeated="3" table:style-name="ce486"/>
          <table:covered-table-cell table:style-name="ce488"/>
          <table:table-cell table:style-name="ce488" office:value-type="string" calcext:value-type="string">
            <text:p>OPERACIÓN</text:p>
          </table:table-cell>
          <table:table-cell table:style-name="ce498" office:value-type="string" office:string-value="TOTAL" calcext:value-type="string" table:number-columns-spanned="1" table:number-rows-spanned="3">
            <text:p><text:s/>TOTAL </text:p>
          </table:table-cell>
          <table:table-cell table:number-columns-repeated="16376"/>
        </table:table-row>
        <table:table-row table:style-name="ro26">
          <table:covered-table-cell table:style-name="ce64"/>
          <table:table-cell table:style-name="ce64" office:value-type="string" calcext:value-type="string" table:number-columns-spanned="5" table:number-rows-spanned="1">
            <text:p>MESES</text:p>
          </table:table-cell>
          <table:covered-table-cell table:number-columns-repeated="3" table:style-name="ce486"/>
          <table:covered-table-cell table:style-name="ce488"/>
          <table:table-cell table:style-name="ce488" office:value-type="string" calcext:value-type="string">
            <text:p>AÑOS </text:p>
          </table:table-cell>
          <table:covered-table-cell table:style-name="ce498"/>
          <table:table-cell table:number-columns-repeated="16376"/>
        </table:table-row>
        <table:table-row table:style-name="ro26">
          <table:covered-table-cell table:style-name="ce64"/>
          <table:table-cell table:style-name="ce64" office:value-type="float" office:value="1" calcext:value-type="float">
            <text:p>1</text:p>
          </table:table-cell>
          <table:table-cell table:style-name="ce64" office:value-type="float" office:value="2" calcext:value-type="float">
            <text:p>2</text:p>
          </table:table-cell>
          <table:table-cell table:style-name="ce64" office:value-type="float" office:value="3" calcext:value-type="float">
            <text:p>3</text:p>
          </table:table-cell>
          <table:table-cell table:style-name="ce64" office:value-type="float" office:value="4" calcext:value-type="float">
            <text:p>4</text:p>
          </table:table-cell>
          <table:table-cell table:style-name="ce64" office:value-type="float" office:value="5" calcext:value-type="float">
            <text:p>5</text:p>
          </table:table-cell>
          <table:table-cell table:style-name="ce64" office:value-type="string" calcext:value-type="string">
            <text:p>1 AL 5</text:p>
          </table:table-cell>
          <table:covered-table-cell table:style-name="ce498"/>
          <table:table-cell table:number-columns-repeated="16376"/>
        </table:table-row>
        <table:table-row table:style-name="ro26">
          <table:table-cell table:style-name="ce476" table:formula="of:=+[.A6]" office:value-type="string" office:string-value="I.INVERSION FIJA " calcext:value-type="string">
            <text:p>I.INVERSION FIJA </text:p>
          </table:table-cell>
          <table:table-cell table:style-name="ce476" table:number-columns-repeated="5"/>
          <table:table-cell table:style-name="ce491"/>
          <table:table-cell table:style-name="ce500"/>
          <table:table-cell table:number-columns-repeated="16376"/>
        </table:table-row>
        <table:table-row table:style-name="ro26">
          <table:table-cell table:style-name="ce476" table:formula="of:=+[.A7]" office:value-type="string" office:string-value="  I.1. INVERSION FIJA TANGIBLE" calcext:value-type="string">
            <text:p><text:s text:c="2"/>I.1. INVERSION FIJA TANGIBLE</text:p>
          </table:table-cell>
          <table:table-cell table:style-name="ce477" table:number-columns-repeated="5"/>
          <table:table-cell table:style-name="ce491"/>
          <table:table-cell table:style-name="ce500"/>
          <table:table-cell table:number-columns-repeated="16376"/>
        </table:table-row>
        <table:table-row table:style-name="ro26">
          <table:table-cell table:style-name="ce476" table:formula="of:=+[.A8]" office:value-type="string" office:string-value="     I.1.1. TERRENOS Y OBRAS CIVILES" calcext:value-type="string">
            <text:p><text:s text:c="5"/>I.1.1. TERRENOS Y OBRAS CIVILES</text:p>
          </table:table-cell>
          <table:table-cell table:style-name="ce485" table:formula="of:=100%/5" office:value-type="percentage" office:value="0.2" calcext:value-type="percentage">
            <text:p>20.00 %</text:p>
          </table:table-cell>
          <table:table-cell table:style-name="ce485" table:formula="of:=+[.B31]" office:value-type="percentage" office:value="0.2" calcext:value-type="percentage">
            <text:p>20.00 %</text:p>
          </table:table-cell>
          <table:table-cell table:style-name="ce485" table:formula="of:=+[.C31]" office:value-type="percentage" office:value="0.2" calcext:value-type="percentage">
            <text:p>20.00 %</text:p>
          </table:table-cell>
          <table:table-cell table:style-name="ce485" table:formula="of:=+[.D31]" office:value-type="percentage" office:value="0.2" calcext:value-type="percentage">
            <text:p>20.00 %</text:p>
          </table:table-cell>
          <table:table-cell table:style-name="ce485" table:formula="of:=+[.E31]" office:value-type="percentage" office:value="0.2" calcext:value-type="percentage">
            <text:p>20.00 %</text:p>
          </table:table-cell>
          <table:table-cell table:style-name="ce491"/>
          <table:table-cell table:style-name="ce503" table:formula="of:=SUM([.B31:.G31])" office:value-type="percentage" office:value="1" calcext:value-type="percentage">
            <text:p>100 %</text:p>
          </table:table-cell>
          <table:table-cell table:number-columns-repeated="16376"/>
        </table:table-row>
        <table:table-row table:style-name="ro26">
          <table:table-cell table:style-name="ce476" table:formula="of:=+[.A9]" office:value-type="string" office:string-value="     I.1.2. MAQUINARIA Y EQUIPO" calcext:value-type="string">
            <text:p><text:s text:c="5"/>I.1.2. MAQUINARIA Y EQUIPO</text:p>
          </table:table-cell>
          <table:table-cell table:style-name="ce485"/>
          <table:table-cell table:style-name="ce485" table:formula="of:=100%/3" office:value-type="percentage" office:value="0.333333333333333" calcext:value-type="percentage">
            <text:p>33.33 %</text:p>
          </table:table-cell>
          <table:table-cell table:style-name="ce485" table:formula="of:=+[.C32]" office:value-type="percentage" office:value="0.333333333333333" calcext:value-type="percentage">
            <text:p>33.33 %</text:p>
          </table:table-cell>
          <table:table-cell table:style-name="ce485" table:formula="of:=+[.D32]" office:value-type="percentage" office:value="0.333333333333333" calcext:value-type="percentage">
            <text:p>33.33 %</text:p>
          </table:table-cell>
          <table:table-cell table:style-name="ce477"/>
          <table:table-cell table:style-name="ce491"/>
          <table:table-cell table:style-name="ce503" table:formula="of:=SUM([.B32:.G32])" office:value-type="percentage" office:value="1" calcext:value-type="percentage">
            <text:p>100 %</text:p>
          </table:table-cell>
          <table:table-cell table:number-columns-repeated="16376"/>
        </table:table-row>
        <table:table-row table:style-name="ro26">
          <table:table-cell table:style-name="ce476" table:formula="of:=+[.A10]" office:value-type="string" office:string-value="     I.1.3. VEHICULOS" calcext:value-type="string">
            <text:p><text:s text:c="5"/>I.1.3. VEHICULOS</text:p>
          </table:table-cell>
          <table:table-cell table:style-name="ce477" table:number-columns-repeated="5"/>
          <table:table-cell table:style-name="ce491"/>
          <table:table-cell table:style-name="ce503"/>
          <table:table-cell table:number-columns-repeated="16376"/>
        </table:table-row>
        <table:table-row table:style-name="ro26">
          <table:table-cell table:style-name="ce476" table:formula="of:=+[.A11]" office:value-type="string" office:string-value="     I.1.4. MUEBLES Y ENSERES" calcext:value-type="string">
            <text:p><text:s text:c="5"/>I.1.4. MUEBLES Y ENSERES</text:p>
          </table:table-cell>
          <table:table-cell table:style-name="ce477" table:number-columns-repeated="4"/>
          <table:table-cell table:style-name="ce485" table:formula="of:=100%" office:value-type="percentage" office:value="1" calcext:value-type="percentage">
            <text:p>100.00 %</text:p>
          </table:table-cell>
          <table:table-cell table:style-name="ce491"/>
          <table:table-cell table:style-name="ce503" table:formula="of:=SUM([.B34:.G34])" office:value-type="percentage" office:value="1" calcext:value-type="percentage">
            <text:p>100 %</text:p>
          </table:table-cell>
          <table:table-cell table:number-columns-repeated="16376"/>
        </table:table-row>
        <table:table-row table:style-name="ro26">
          <table:table-cell table:style-name="ce476" table:formula="of:=+[.A12]" office:value-type="string" office:string-value="  I.2. INVERSION FIJA INTANGIBLE" calcext:value-type="string">
            <text:p><text:s text:c="2"/>I.2. INVERSION FIJA INTANGIBLE</text:p>
          </table:table-cell>
          <table:table-cell table:style-name="ce485" table:formula="of:=100%/5" office:value-type="percentage" office:value="0.2" calcext:value-type="percentage">
            <text:p>20.00 %</text:p>
          </table:table-cell>
          <table:table-cell table:style-name="ce485" table:formula="of:=+[.B35]" office:value-type="percentage" office:value="0.2" calcext:value-type="percentage">
            <text:p>20.00 %</text:p>
          </table:table-cell>
          <table:table-cell table:style-name="ce485" table:formula="of:=+[.C35]" office:value-type="percentage" office:value="0.2" calcext:value-type="percentage">
            <text:p>20.00 %</text:p>
          </table:table-cell>
          <table:table-cell table:style-name="ce485" table:formula="of:=+[.D35]" office:value-type="percentage" office:value="0.2" calcext:value-type="percentage">
            <text:p>20.00 %</text:p>
          </table:table-cell>
          <table:table-cell table:style-name="ce485" table:formula="of:=+[.E35]" office:value-type="percentage" office:value="0.2" calcext:value-type="percentage">
            <text:p>20.00 %</text:p>
          </table:table-cell>
          <table:table-cell table:style-name="ce491"/>
          <table:table-cell table:style-name="ce503" table:formula="of:=SUM([.B35:.G35])" office:value-type="percentage" office:value="1" calcext:value-type="percentage">
            <text:p>100 %</text:p>
          </table:table-cell>
          <table:table-cell table:number-columns-repeated="16376"/>
        </table:table-row>
        <table:table-row table:style-name="ro26">
          <table:table-cell table:style-name="ce476" table:formula="of:=+[.A13]" office:value-type="string" office:string-value="II. CAPITAL DE TRABAJO" calcext:value-type="string">
            <text:p>II. CAPITAL DE TRABAJO</text:p>
          </table:table-cell>
          <table:table-cell table:style-name="ce485" table:number-columns-repeated="4"/>
          <table:table-cell table:style-name="ce477"/>
          <table:table-cell table:style-name="ce496" table:formula="of:=100%" office:value-type="percentage" office:value="1" calcext:value-type="percentage">
            <text:p>100.00 %</text:p>
          </table:table-cell>
          <table:table-cell table:style-name="ce503" table:formula="of:=SUM([.B36:.G36])" office:value-type="percentage" office:value="1" calcext:value-type="percentage">
            <text:p>100 %</text:p>
          </table:table-cell>
          <table:table-cell table:number-columns-repeated="16376"/>
        </table:table-row>
        <table:table-row table:style-name="ro26">
          <table:table-cell table:style-name="ce476" table:formula="of:=+[.A14]" office:value-type="string" office:string-value="III. GASTOS GENERALES ( 8.0 % )IF" calcext:value-type="string">
            <text:p>III. GASTOS GENERALES ( 8.0 % )IF</text:p>
          </table:table-cell>
          <table:table-cell table:style-name="ce485" table:formula="of:=100%/5" office:value-type="percentage" office:value="0.2" calcext:value-type="percentage">
            <text:p>20.00 %</text:p>
          </table:table-cell>
          <table:table-cell table:style-name="ce485" table:formula="of:=+[.B37]" office:value-type="percentage" office:value="0.2" calcext:value-type="percentage">
            <text:p>20.00 %</text:p>
          </table:table-cell>
          <table:table-cell table:style-name="ce485" table:formula="of:=+[.C37]" office:value-type="percentage" office:value="0.2" calcext:value-type="percentage">
            <text:p>20.00 %</text:p>
          </table:table-cell>
          <table:table-cell table:style-name="ce485" table:formula="of:=+[.D37]" office:value-type="percentage" office:value="0.2" calcext:value-type="percentage">
            <text:p>20.00 %</text:p>
          </table:table-cell>
          <table:table-cell table:style-name="ce485" table:formula="of:=+[.E37]" office:value-type="percentage" office:value="0.2" calcext:value-type="percentage">
            <text:p>20.00 %</text:p>
          </table:table-cell>
          <table:table-cell table:style-name="ce491"/>
          <table:table-cell table:style-name="ce503" table:formula="of:=SUM([.B37:.G37])" office:value-type="percentage" office:value="1" calcext:value-type="percentage">
            <text:p>100 %</text:p>
          </table:table-cell>
          <table:table-cell table:number-columns-repeated="16376"/>
        </table:table-row>
        <table:table-row table:style-name="ro26">
          <table:table-cell table:style-name="ce476" table:formula="of:=+[.A15]" office:value-type="string" office:string-value="IV. GASTOS DE SUPERVISION (4.%) IF" calcext:value-type="string">
            <text:p>IV. GASTOS DE SUPERVISION (4.%) IF</text:p>
          </table:table-cell>
          <table:table-cell table:style-name="ce485" table:formula="of:=[.B37]" office:value-type="percentage" office:value="0.2" calcext:value-type="percentage">
            <text:p>20.00 %</text:p>
          </table:table-cell>
          <table:table-cell table:style-name="ce485" table:formula="of:=[.C37]" office:value-type="percentage" office:value="0.2" calcext:value-type="percentage">
            <text:p>20.00 %</text:p>
          </table:table-cell>
          <table:table-cell table:style-name="ce485" table:formula="of:=[.D37]" office:value-type="percentage" office:value="0.2" calcext:value-type="percentage">
            <text:p>20.00 %</text:p>
          </table:table-cell>
          <table:table-cell table:style-name="ce485" table:formula="of:=[.E37]" office:value-type="percentage" office:value="0.2" calcext:value-type="percentage">
            <text:p>20.00 %</text:p>
          </table:table-cell>
          <table:table-cell table:style-name="ce485" table:formula="of:=[.F37]" office:value-type="percentage" office:value="0.2" calcext:value-type="percentage">
            <text:p>20.00 %</text:p>
          </table:table-cell>
          <table:table-cell table:style-name="ce491"/>
          <table:table-cell table:style-name="ce503" table:formula="of:=SUM([.B38:.G38])" office:value-type="percentage" office:value="1" calcext:value-type="percentage">
            <text:p>100 %</text:p>
          </table:table-cell>
          <table:table-cell table:number-columns-repeated="16376"/>
        </table:table-row>
        <table:table-row table:style-name="ro26">
          <table:table-cell table:style-name="ce479"/>
          <table:table-cell table:number-columns-repeated="16383"/>
        </table:table-row>
        <table:table-row table:style-name="ro26" table:number-rows-repeated="1048536">
          <table:table-cell table:number-columns-repeated="16384"/>
        </table:table-row>
        <table:table-row table:style-name="ro26">
          <table:table-cell table:number-columns-repeated="16384"/>
        </table:table-row>
        <table:named-expressions>
          <table:named-range table:name="_xlnm.Print_Area" table:base-cell-address="$POBLACION.$A$1" table:cell-range-address="$CRONOG.$A$2:.$H$39" table:range-usable-as="print-range"/>
        </table:named-expressions>
      </table:table>
      <table:table table:name="FINANCIAMIENT" table:style-name="ta14" table:print-ranges="FINANCIAMIENT.A1:FINANCIAMIENT.E55">
        <table:table-column table:style-name="co84" table:default-cell-style-name="ce336"/>
        <table:table-column table:style-name="co85" table:default-cell-style-name="ce336"/>
        <table:table-column table:style-name="co86" table:default-cell-style-name="ce336"/>
        <table:table-column table:style-name="co87" table:default-cell-style-name="ce336"/>
        <table:table-column table:style-name="co42" table:default-cell-style-name="ce336"/>
        <table:table-column table:style-name="co50" table:default-cell-style-name="ce336"/>
        <table:table-column table:style-name="co65" table:default-cell-style-name="ce336"/>
        <table:table-column table:style-name="co1" table:number-columns-repeated="16377" table:default-cell-style-name="ce336"/>
        <table:table-row table:style-name="ro1">
          <table:table-cell table:style-name="ce507" office:value-type="string" calcext:value-type="string">
            <text:p><text:s text:c="36"/>ESTRUCTURA DE FINANCIAMIENTO PLAN DE NEGOCIO</text:p>
          </table:table-cell>
          <table:table-cell table:style-name="ce519" table:number-columns-repeated="3"/>
          <table:table-cell table:style-name="ce557" table:number-columns-repeated="16380"/>
        </table:table-row>
        <table:table-row table:style-name="ro36">
          <table:table-cell table:style-name="ce508" office:value-type="string" calcext:value-type="string">
            <text:p>CONCEPTO</text:p>
          </table:table-cell>
          <table:table-cell table:style-name="ce508" office:value-type="string" calcext:value-type="string">
            <text:p>APORTE DE LOS SOCIOS CON PRESTAMO</text:p>
          </table:table-cell>
          <table:table-cell table:style-name="ce542" office:value-type="string" calcext:value-type="string">
            <text:p>APORTE PROCOMPITE</text:p>
          </table:table-cell>
          <table:table-cell table:style-name="ce550" office:value-type="string" calcext:value-type="string">
            <text:p>TOTAL FINANCIEMIENTO</text:p>
          </table:table-cell>
          <table:table-cell table:style-name="ce558" table:number-columns-repeated="16380"/>
        </table:table-row>
        <table:table-row table:style-name="ro1">
          <table:table-cell table:style-name="ce392" office:value-type="string" calcext:value-type="string">
            <text:p>I.INVERSION FIJA </text:p>
          </table:table-cell>
          <table:table-cell table:style-name="ce520" table:formula="of:=[.B4]+[.B9]" office:value-type="float" office:value="26522" calcext:value-type="float">
            <text:p><text:s/>26,522.00 </text:p>
          </table:table-cell>
          <table:table-cell table:style-name="ce520" table:formula="of:=[.C4]+[.C9]" office:value-type="float" office:value="94804" calcext:value-type="float">
            <text:p><text:s/>94,804.00 </text:p>
          </table:table-cell>
          <table:table-cell table:style-name="ce520" table:formula="of:=[.D4]+[.D9]" office:value-type="float" office:value="121326" calcext:value-type="float">
            <text:p><text:s/>121,326.00 </text:p>
          </table:table-cell>
          <table:table-cell table:style-name="ce559" table:number-columns-repeated="2"/>
          <table:table-cell table:style-name="ce557" table:number-columns-repeated="16378"/>
        </table:table-row>
        <table:table-row table:style-name="ro1">
          <table:table-cell table:style-name="ce395" office:value-type="string" calcext:value-type="string">
            <text:p><text:s text:c="2"/>I.1. INVERSION FIJA TANGIBLE</text:p>
          </table:table-cell>
          <table:table-cell table:style-name="ce521" table:formula="of:=SUM([.B5:.B8])" office:value-type="float" office:value="26522" calcext:value-type="float">
            <text:p><text:s/>26,522.00 </text:p>
          </table:table-cell>
          <table:table-cell table:style-name="ce521" table:formula="of:=SUM([.C5:.C8])" office:value-type="float" office:value="76554" calcext:value-type="float">
            <text:p><text:s/>76,554.00 </text:p>
          </table:table-cell>
          <table:table-cell table:style-name="ce551" table:formula="of:=SUM([.D5:.D8])" office:value-type="float" office:value="103076" calcext:value-type="float">
            <text:p><text:s/>103,076.00 </text:p>
          </table:table-cell>
          <table:table-cell table:style-name="ce559"/>
          <table:table-cell table:style-name="ce557" table:number-columns-repeated="16379"/>
        </table:table-row>
        <table:table-row table:style-name="ro1">
          <table:table-cell table:style-name="ce395" office:value-type="string" calcext:value-type="string">
            <text:p><text:s text:c="5"/>I.1.1. TERRENOS Y OBRAS CIVILES</text:p>
          </table:table-cell>
          <table:table-cell table:style-name="ce521" table:formula="of:=+[$INVERSION.C8]" office:value-type="float" office:value="21522" calcext:value-type="float">
            <text:p><text:s/>21,522.00 </text:p>
          </table:table-cell>
          <table:table-cell table:style-name="ce521" table:formula="of:=+[$INVERSION.D8]" office:value-type="float" office:value="45846" calcext:value-type="float">
            <text:p><text:s/>45,846.00 </text:p>
          </table:table-cell>
          <table:table-cell table:style-name="ce551" table:formula="of:=[.B5]+[.C5]" office:value-type="float" office:value="67368" calcext:value-type="float">
            <text:p><text:s/>67,368.00 </text:p>
          </table:table-cell>
          <table:table-cell table:style-name="ce559"/>
          <table:table-cell table:style-name="ce557" table:number-columns-repeated="16379"/>
        </table:table-row>
        <table:table-row table:style-name="ro1">
          <table:table-cell table:style-name="ce395" office:value-type="string" calcext:value-type="string">
            <text:p><text:s text:c="5"/>I.1.2. MAQUINARIA Y EQUIPOS</text:p>
          </table:table-cell>
          <table:table-cell table:style-name="ce521" table:formula="of:=+[$INVERSION.C41]" office:value-type="float" office:value="0" calcext:value-type="float">
            <text:p><text:s/>- <text:s text:c="2"/></text:p>
          </table:table-cell>
          <table:table-cell table:style-name="ce521" table:formula="of:=+[$INVERSION.D41]" office:value-type="float" office:value="30408" calcext:value-type="float">
            <text:p><text:s/>30,408.00 </text:p>
          </table:table-cell>
          <table:table-cell table:style-name="ce551" table:formula="of:=[.B6]+[.C6]" office:value-type="float" office:value="30408" calcext:value-type="float">
            <text:p><text:s/>30,408.00 </text:p>
          </table:table-cell>
          <table:table-cell table:style-name="ce559"/>
          <table:table-cell table:style-name="ce557" table:number-columns-repeated="16379"/>
        </table:table-row>
        <table:table-row table:style-name="ro1">
          <table:table-cell table:style-name="ce395" office:value-type="string" calcext:value-type="string">
            <text:p><text:s text:c="5"/>I.1.3. VEHICULOS</text:p>
          </table:table-cell>
          <table:table-cell table:style-name="ce521" table:formula="of:=+[$INVERSION.C55]" office:value-type="float" office:value="0" calcext:value-type="float">
            <text:p><text:s/>- <text:s text:c="2"/></text:p>
          </table:table-cell>
          <table:table-cell table:style-name="ce521" table:formula="of:=+[$INVERSION.D55]" office:value-type="float" office:value="0" calcext:value-type="float">
            <text:p><text:s/>- <text:s text:c="2"/></text:p>
          </table:table-cell>
          <table:table-cell table:style-name="ce551" table:formula="of:=[.B7]+[.C7]" office:value-type="float" office:value="0" calcext:value-type="float">
            <text:p><text:s/>- <text:s text:c="2"/></text:p>
          </table:table-cell>
          <table:table-cell table:style-name="ce559"/>
          <table:table-cell table:style-name="ce557" table:number-columns-repeated="16379"/>
        </table:table-row>
        <table:table-row table:style-name="ro1">
          <table:table-cell table:style-name="ce395" office:value-type="string" calcext:value-type="string">
            <text:p><text:s text:c="5"/>I.1.4. MUEBLES Y ENSERES</text:p>
          </table:table-cell>
          <table:table-cell table:style-name="ce521" table:formula="of:=+[$INVERSION.C57]" office:value-type="float" office:value="5000" calcext:value-type="float">
            <text:p><text:s/>5,000.00 </text:p>
          </table:table-cell>
          <table:table-cell table:style-name="ce521" table:formula="of:=+[$INVERSION.D57]" office:value-type="float" office:value="300" calcext:value-type="float">
            <text:p><text:s/>300.00 </text:p>
          </table:table-cell>
          <table:table-cell table:style-name="ce551" table:formula="of:=[.B8]+[.C8]" office:value-type="float" office:value="5300" calcext:value-type="float">
            <text:p><text:s/>5,300.00 </text:p>
          </table:table-cell>
          <table:table-cell table:style-name="ce559"/>
          <table:table-cell table:style-name="ce557" table:number-columns-repeated="16379"/>
        </table:table-row>
        <table:table-row table:style-name="ro1">
          <table:table-cell table:style-name="ce395" office:value-type="string" calcext:value-type="string">
            <text:p><text:s text:c="2"/>I.2. INVERSION FIJA INTANGIBLE</text:p>
          </table:table-cell>
          <table:table-cell table:style-name="ce522" table:formula="of:=+[$INVERSION.C61]" office:value-type="float" office:value="0" calcext:value-type="float">
            <text:p><text:s/>- <text:s text:c="2"/></text:p>
          </table:table-cell>
          <table:table-cell table:style-name="ce522" table:formula="of:=+[$INVERSION.D61]" office:value-type="float" office:value="18250" calcext:value-type="float">
            <text:p><text:s/>18,250.00 </text:p>
          </table:table-cell>
          <table:table-cell table:style-name="ce551" table:formula="of:=[.B9]+[.C9]" office:value-type="float" office:value="18250" calcext:value-type="float">
            <text:p><text:s/>18,250.00 </text:p>
          </table:table-cell>
          <table:table-cell table:style-name="ce559"/>
          <table:table-cell table:style-name="ce557" table:number-columns-repeated="16379"/>
        </table:table-row>
        <table:table-row table:style-name="ro1">
          <table:table-cell table:style-name="ce392" table:formula="of:=+[$INVERSION.E13]" office:value-type="string" office:string-value="II. CAPITAL DE TRABAJO" calcext:value-type="string">
            <text:p>II. CAPITAL DE TRABAJO</text:p>
          </table:table-cell>
          <table:table-cell table:style-name="ce520" table:formula="of:=+[$INVERSION.C65]" office:value-type="float" office:value="4173.44538552312" calcext:value-type="float">
            <text:p><text:s/>4,173.45 </text:p>
          </table:table-cell>
          <table:table-cell table:style-name="ce520" table:formula="of:=+[$INVERSION.D65]" office:value-type="float" office:value="0" calcext:value-type="float">
            <text:p><text:s/>- <text:s text:c="2"/></text:p>
          </table:table-cell>
          <table:table-cell table:style-name="ce552" table:formula="of:=[.B10]+[.C10]" office:value-type="float" office:value="4173.44538552312" calcext:value-type="float">
            <text:p><text:s/>4,173.45 </text:p>
          </table:table-cell>
          <table:table-cell table:style-name="ce559"/>
          <table:table-cell table:style-name="ce557" table:number-columns-repeated="16379"/>
        </table:table-row>
        <table:table-row table:style-name="ro1">
          <table:table-cell table:style-name="ce392" table:formula="of:=+[$INVERSION.E14]" office:value-type="string" office:string-value="III. GASTOS GENERALES ( 8.0 % )IF" calcext:value-type="string">
            <text:p>III. GASTOS GENERALES ( 8.0 % )IF</text:p>
          </table:table-cell>
          <table:table-cell table:style-name="ce520" table:formula="of:=+[$INVERSION.C66]" office:value-type="float" office:value="0" calcext:value-type="float">
            <text:p><text:s/>- <text:s text:c="2"/></text:p>
          </table:table-cell>
          <table:table-cell table:style-name="ce520" table:formula="of:=+[$INVERSION.D66]" office:value-type="float" office:value="9706.08" calcext:value-type="float">
            <text:p><text:s/>9,706.08 </text:p>
          </table:table-cell>
          <table:table-cell table:style-name="ce552" table:formula="of:=[.B11]+[.C11]" office:value-type="float" office:value="9706.08" calcext:value-type="float">
            <text:p><text:s/>9,706.08 </text:p>
          </table:table-cell>
          <table:table-cell table:style-name="ce559"/>
          <table:table-cell table:style-name="ce557" table:number-columns-repeated="16379"/>
        </table:table-row>
        <table:table-row table:style-name="ro1">
          <table:table-cell table:style-name="ce392" table:formula="of:=+[$INVERSION.E15]" office:value-type="string" office:string-value="IV. GASTOS DE SUPERVISION (4.%) IF" calcext:value-type="string">
            <text:p>IV. GASTOS DE SUPERVISION (4.%) IF</text:p>
          </table:table-cell>
          <table:table-cell table:style-name="ce520" table:formula="of:=+[$INVERSION.C67]" office:value-type="float" office:value="0" calcext:value-type="float">
            <text:p><text:s/>- <text:s text:c="2"/></text:p>
          </table:table-cell>
          <table:table-cell table:style-name="ce520" table:formula="of:=+[$INVERSION.D67]" office:value-type="float" office:value="4853.04" calcext:value-type="float">
            <text:p><text:s/>4,853.04 </text:p>
          </table:table-cell>
          <table:table-cell table:style-name="ce552" table:formula="of:=[.B12]+[.C12]" office:value-type="float" office:value="4853.04" calcext:value-type="float">
            <text:p><text:s/>4,853.04 </text:p>
          </table:table-cell>
          <table:table-cell table:style-name="ce559"/>
          <table:table-cell table:style-name="ce557" table:number-columns-repeated="16379"/>
        </table:table-row>
        <table:table-row table:style-name="ro1">
          <table:table-cell table:style-name="ce392" office:value-type="string" calcext:value-type="string">
            <text:p>TOTAL INVERSIÒN</text:p>
          </table:table-cell>
          <table:table-cell table:style-name="ce520" table:formula="of:=[.B3]+[.B10]+[.B11]+[.B12]" office:value-type="float" office:value="30695.4453855231" calcext:value-type="float">
            <text:p><text:s/>30,695.45 </text:p>
          </table:table-cell>
          <table:table-cell table:style-name="ce520" table:formula="of:=[.C3]+[.C10]+[.C11]+[.C12]" office:value-type="float" office:value="109363.12" calcext:value-type="float">
            <text:p><text:s/>109,363.12 </text:p>
          </table:table-cell>
          <table:table-cell table:style-name="ce552" table:formula="of:=[.D3]+[.D10]+[.D11]+[.D12]" office:value-type="float" office:value="140058.565385523" calcext:value-type="float">
            <text:p><text:s/>140,058.57 </text:p>
          </table:table-cell>
          <table:table-cell table:style-name="ce559"/>
          <table:table-cell table:style-name="ce557"/>
          <table:table-cell table:style-name="ce559"/>
          <table:table-cell table:style-name="ce557" table:number-columns-repeated="16377"/>
        </table:table-row>
        <table:table-row table:style-name="ro1">
          <table:table-cell table:style-name="ce392" office:value-type="string" calcext:value-type="string">
            <text:p>PORCENTAJE</text:p>
          </table:table-cell>
          <table:table-cell table:style-name="ce520" table:formula="of:=([.B13]*[.$D$14]/[.$D$13])" office:value-type="float" office:value="21.9161500769562" calcext:value-type="float">
            <text:p><text:s/>21.92 </text:p>
          </table:table-cell>
          <table:table-cell table:style-name="ce520" table:formula="of:=([.C13]*[.$D$14]/[.$D$13])" office:value-type="float" office:value="78.0838499230438" calcext:value-type="float">
            <text:p><text:s/>78.08 </text:p>
          </table:table-cell>
          <table:table-cell table:style-name="ce553" office:value-type="float" office:value="100" calcext:value-type="float">
            <text:p>100</text:p>
          </table:table-cell>
          <table:table-cell table:style-name="ce560"/>
          <table:table-cell table:style-name="ce559"/>
          <table:table-cell table:style-name="ce557" table:number-columns-repeated="16378"/>
        </table:table-row>
        <table:table-row table:style-name="ro1">
          <table:table-cell table:style-name="ce509" office:value-type="string" calcext:value-type="string">
            <text:p>FUENTE: ELABORACION PROPIA</text:p>
          </table:table-cell>
          <table:table-cell table:style-name="ce523" table:number-columns-repeated="3"/>
          <table:table-cell table:style-name="ce364"/>
          <table:table-cell table:style-name="ce557" table:number-columns-repeated="16379"/>
        </table:table-row>
        <table:table-row table:style-name="ro1">
          <table:table-cell table:style-name="ce360"/>
          <table:table-cell/>
          <table:table-cell table:style-name="ce427"/>
          <table:table-cell table:number-columns-repeated="16381"/>
        </table:table-row>
        <table:table-row table:style-name="ro1">
          <table:table-cell table:style-name="ce360" office:value-type="string" calcext:value-type="string">
            <text:p><text:s text:c="36"/>ESTRUCTURA DE INVERSION Y FINANCIAMIENTO PLAN DE NEGOCIO</text:p>
          </table:table-cell>
          <table:table-cell table:number-columns-repeated="16383"/>
        </table:table-row>
        <table:table-row table:style-name="ro13">
          <table:table-cell table:style-name="ce291" office:value-type="string" calcext:value-type="string" table:number-columns-spanned="1" table:number-rows-spanned="2">
            <text:p>CONCEPTO</text:p>
          </table:table-cell>
          <table:table-cell table:style-name="ce291" office:value-type="string" calcext:value-type="string" table:number-columns-spanned="2" table:number-rows-spanned="1">
            <text:p>CONTRAPARTIDA</text:p>
          </table:table-cell>
          <table:covered-table-cell table:style-name="ce543"/>
          <table:table-cell table:style-name="ce554" office:value-type="string" calcext:value-type="string">
            <text:p>COFINANCIAMIENTO</text:p>
          </table:table-cell>
          <table:table-cell table:style-name="ce291" office:value-type="string" calcext:value-type="string" table:number-columns-spanned="1" table:number-rows-spanned="2">
            <text:p>TOTAL INVERSION</text:p>
          </table:table-cell>
          <table:table-cell table:style-name="ce359" table:number-columns-repeated="16379"/>
        </table:table-row>
        <table:table-row table:style-name="ro1">
          <table:covered-table-cell table:style-name="ce510"/>
          <table:table-cell table:style-name="ce291" office:value-type="string" calcext:value-type="string">
            <text:p>Aporte del AEO</text:p>
          </table:table-cell>
          <table:table-cell table:style-name="ce291" office:value-type="string" calcext:value-type="string">
            <text:p>Préstamo</text:p>
          </table:table-cell>
          <table:table-cell table:style-name="ce291" office:value-type="string" calcext:value-type="string">
            <text:p>Procompite</text:p>
          </table:table-cell>
          <table:covered-table-cell table:style-name="ce510"/>
          <table:table-cell table:style-name="ce359" table:number-columns-repeated="16379"/>
        </table:table-row>
        <table:table-row table:style-name="ro1">
          <table:table-cell table:style-name="ce347" table:formula="of:=+[.A3]" office:value-type="string" office:string-value="I.INVERSION FIJA " calcext:value-type="string">
            <text:p>I.INVERSION FIJA </text:p>
          </table:table-cell>
          <table:table-cell table:style-name="ce343" table:formula="of:=[.B21]+[.B26]" office:value-type="float" office:value="26522" calcext:value-type="float">
            <text:p><text:s/>26,522.00 </text:p>
          </table:table-cell>
          <table:table-cell table:style-name="ce343"/>
          <table:table-cell table:style-name="ce555" table:formula="of:=[.D21]+[.D26]" office:value-type="float" office:value="94804" calcext:value-type="float">
            <text:p><text:s/>94,804.00 </text:p>
          </table:table-cell>
          <table:table-cell table:style-name="ce343" table:formula="of:=[.E21]+[.E26]" office:value-type="float" office:value="121326" calcext:value-type="float">
            <text:p><text:s/>121,326.00 </text:p>
          </table:table-cell>
          <table:table-cell table:style-name="ce427"/>
          <table:table-cell table:number-columns-repeated="16378"/>
        </table:table-row>
        <table:table-row table:style-name="ro1">
          <table:table-cell table:style-name="ce337" table:formula="of:=+[.A4]" office:value-type="string" office:string-value="  I.1. INVERSION FIJA TANGIBLE" calcext:value-type="string">
            <text:p><text:s text:c="2"/>I.1. INVERSION FIJA TANGIBLE</text:p>
          </table:table-cell>
          <table:table-cell table:style-name="ce343" table:formula="of:=SUM([.B22:.B25])" office:value-type="float" office:value="26522" calcext:value-type="float">
            <text:p><text:s/>26,522.00 </text:p>
          </table:table-cell>
          <table:table-cell table:style-name="ce343"/>
          <table:table-cell table:style-name="ce555" table:formula="of:=SUM([.D22:.D25])" office:value-type="float" office:value="76554" calcext:value-type="float">
            <text:p><text:s/>76,554.00 </text:p>
          </table:table-cell>
          <table:table-cell table:style-name="ce561" table:formula="of:=SUM([.E22:.E25])" office:value-type="float" office:value="103076" calcext:value-type="float">
            <text:p><text:s/>103,076.00 </text:p>
          </table:table-cell>
          <table:table-cell table:style-name="ce427"/>
          <table:table-cell table:number-columns-repeated="16378"/>
        </table:table-row>
        <table:table-row table:style-name="ro1">
          <table:table-cell table:style-name="ce337" table:formula="of:=+[.A5]" office:value-type="string" office:string-value="     I.1.1. TERRENOS Y OBRAS CIVILES" calcext:value-type="string">
            <text:p><text:s text:c="5"/>I.1.1. TERRENOS Y OBRAS CIVILES</text:p>
          </table:table-cell>
          <table:table-cell table:style-name="ce524" table:formula="of:=+[.B5]" office:value-type="float" office:value="21522" calcext:value-type="float">
            <text:p><text:s/>21,522.00 </text:p>
          </table:table-cell>
          <table:table-cell table:style-name="ce342"/>
          <table:table-cell table:style-name="ce556" table:formula="of:=+[.C5]" office:value-type="float" office:value="45846" calcext:value-type="float">
            <text:p><text:s/>45,846.00 </text:p>
          </table:table-cell>
          <table:table-cell table:style-name="ce562" table:formula="of:=[.B22]+[.D22]+[.C22]" office:value-type="float" office:value="67368" calcext:value-type="float">
            <text:p><text:s/>67,368.00 </text:p>
          </table:table-cell>
          <table:table-cell table:style-name="ce427"/>
          <table:table-cell table:number-columns-repeated="16378"/>
        </table:table-row>
        <table:table-row table:style-name="ro1">
          <table:table-cell table:style-name="ce337" table:formula="of:=+[.A6]" office:value-type="string" office:string-value="     I.1.2. MAQUINARIA Y EQUIPOS" calcext:value-type="string">
            <text:p><text:s text:c="5"/>I.1.2. MAQUINARIA Y EQUIPOS</text:p>
          </table:table-cell>
          <table:table-cell table:style-name="ce524" table:formula="of:=+[.B6]" office:value-type="float" office:value="0" calcext:value-type="float">
            <text:p><text:s/>- <text:s text:c="2"/></text:p>
          </table:table-cell>
          <table:table-cell table:style-name="ce342"/>
          <table:table-cell table:style-name="ce556" table:formula="of:=+[.C6]" office:value-type="float" office:value="30408" calcext:value-type="float">
            <text:p><text:s/>30,408.00 </text:p>
          </table:table-cell>
          <table:table-cell table:style-name="ce562" table:formula="of:=[.B23]+[.D23]+[.C23]" office:value-type="float" office:value="30408" calcext:value-type="float">
            <text:p><text:s/>30,408.00 </text:p>
          </table:table-cell>
          <table:table-cell table:style-name="ce427"/>
          <table:table-cell table:number-columns-repeated="16378"/>
        </table:table-row>
        <table:table-row table:style-name="ro1">
          <table:table-cell table:style-name="ce337" table:formula="of:=+[.A7]" office:value-type="string" office:string-value="     I.1.3. VEHICULOS" calcext:value-type="string">
            <text:p><text:s text:c="5"/>I.1.3. VEHICULOS</text:p>
          </table:table-cell>
          <table:table-cell table:style-name="ce524" table:formula="of:=+[.B7]" office:value-type="float" office:value="0" calcext:value-type="float">
            <text:p><text:s/>- <text:s text:c="2"/></text:p>
          </table:table-cell>
          <table:table-cell table:style-name="ce342"/>
          <table:table-cell table:style-name="ce556" table:formula="of:=+[.C7]" office:value-type="float" office:value="0" calcext:value-type="float">
            <text:p><text:s/>- <text:s text:c="2"/></text:p>
          </table:table-cell>
          <table:table-cell table:style-name="ce562" table:formula="of:=[.B24]+[.D24]+[.C24]" office:value-type="float" office:value="0" calcext:value-type="float">
            <text:p><text:s/>- <text:s text:c="2"/></text:p>
          </table:table-cell>
          <table:table-cell table:style-name="ce427"/>
          <table:table-cell table:number-columns-repeated="16378"/>
        </table:table-row>
        <table:table-row table:style-name="ro1">
          <table:table-cell table:style-name="ce337" table:formula="of:=+[.A8]" office:value-type="string" office:string-value="     I.1.4. MUEBLES Y ENSERES" calcext:value-type="string">
            <text:p><text:s text:c="5"/>I.1.4. MUEBLES Y ENSERES</text:p>
          </table:table-cell>
          <table:table-cell table:style-name="ce524" table:formula="of:=+[.B8]" office:value-type="float" office:value="5000" calcext:value-type="float">
            <text:p><text:s/>5,000.00 </text:p>
          </table:table-cell>
          <table:table-cell table:style-name="ce342"/>
          <table:table-cell table:style-name="ce556" table:formula="of:=+[.C8]" office:value-type="float" office:value="300" calcext:value-type="float">
            <text:p><text:s/>300.00 </text:p>
          </table:table-cell>
          <table:table-cell table:style-name="ce562" table:formula="of:=[.B25]+[.D25]+[.C25]" office:value-type="float" office:value="5300" calcext:value-type="float">
            <text:p><text:s/>5,300.00 </text:p>
          </table:table-cell>
          <table:table-cell table:style-name="ce427"/>
          <table:table-cell table:number-columns-repeated="16378"/>
        </table:table-row>
        <table:table-row table:style-name="ro1">
          <table:table-cell table:style-name="ce337" table:formula="of:=+[.A9]" office:value-type="string" office:string-value="  I.2. INVERSION FIJA INTANGIBLE" calcext:value-type="string">
            <text:p><text:s text:c="2"/>I.2. INVERSION FIJA INTANGIBLE</text:p>
          </table:table-cell>
          <table:table-cell table:style-name="ce524" table:formula="of:=+[.B9]" office:value-type="float" office:value="0" calcext:value-type="float">
            <text:p><text:s/>- <text:s text:c="2"/></text:p>
          </table:table-cell>
          <table:table-cell table:style-name="ce342"/>
          <table:table-cell table:style-name="ce556" table:formula="of:=+[.C9]" office:value-type="float" office:value="18250" calcext:value-type="float">
            <text:p><text:s/>18,250.00 </text:p>
          </table:table-cell>
          <table:table-cell table:style-name="ce561" table:formula="of:=[.B26]+[.D26]+[.C26]" office:value-type="float" office:value="18250" calcext:value-type="float">
            <text:p><text:s/>18,250.00 </text:p>
          </table:table-cell>
          <table:table-cell table:style-name="ce427"/>
          <table:table-cell table:number-columns-repeated="16378"/>
        </table:table-row>
        <table:table-row table:style-name="ro1">
          <table:table-cell table:style-name="ce347" table:formula="of:=+[.A10]" office:value-type="string" office:string-value="II. CAPITAL DE TRABAJO" calcext:value-type="string">
            <text:p>II. CAPITAL DE TRABAJO</text:p>
          </table:table-cell>
          <table:table-cell table:style-name="ce343" table:formula="of:=+[.B10]-[.C27]" office:value-type="float" office:value="-826.554614476878" calcext:value-type="float">
            <text:p><text:s/>(826.55)</text:p>
          </table:table-cell>
          <table:table-cell table:style-name="ce520" table:formula="of:=+[$INVERSION.M68]" office:value-type="float" office:value="5000" calcext:value-type="float">
            <text:p><text:s/>5,000.00 </text:p>
          </table:table-cell>
          <table:table-cell table:style-name="ce343" table:formula="of:=+[.C10]" office:value-type="float" office:value="0" calcext:value-type="float">
            <text:p><text:s/>- <text:s text:c="2"/></text:p>
          </table:table-cell>
          <table:table-cell table:style-name="ce561" table:formula="of:=[.B27]+[.D27]+[.C27]" office:value-type="float" office:value="4173.44538552312" calcext:value-type="float">
            <text:p><text:s/>4,173.45 </text:p>
          </table:table-cell>
          <table:table-cell table:style-name="ce567"/>
          <table:table-cell table:number-columns-repeated="16378"/>
        </table:table-row>
        <table:table-row table:style-name="ro1">
          <table:table-cell table:style-name="ce347" table:formula="of:=+[.A11]" office:value-type="string" office:string-value="III. GASTOS GENERALES ( 8.0 % )IF" calcext:value-type="string">
            <text:p>III. GASTOS GENERALES ( 8.0 % )IF</text:p>
          </table:table-cell>
          <table:table-cell table:style-name="ce524" table:formula="of:=+[.B11]" office:value-type="float" office:value="0" calcext:value-type="float">
            <text:p><text:s/>- <text:s text:c="2"/></text:p>
          </table:table-cell>
          <table:table-cell table:style-name="ce343"/>
          <table:table-cell table:style-name="ce343" table:formula="of:=+[.C11]" office:value-type="float" office:value="9706.08" calcext:value-type="float">
            <text:p><text:s/>9,706.08 </text:p>
          </table:table-cell>
          <table:table-cell table:style-name="ce561" table:formula="of:=[.B28]+[.D28]+[.C28]" office:value-type="float" office:value="9706.08" calcext:value-type="float">
            <text:p><text:s/>9,706.08 </text:p>
          </table:table-cell>
          <table:table-cell table:style-name="ce427"/>
          <table:table-cell table:number-columns-repeated="16378"/>
        </table:table-row>
        <table:table-row table:style-name="ro1">
          <table:table-cell table:style-name="ce347" table:formula="of:=+[.A12]" office:value-type="string" office:string-value="IV. GASTOS DE SUPERVISION (4.%) IF" calcext:value-type="string">
            <text:p>IV. GASTOS DE SUPERVISION (4.%) IF</text:p>
          </table:table-cell>
          <table:table-cell table:style-name="ce524" table:formula="of:=+[.B12]" office:value-type="float" office:value="0" calcext:value-type="float">
            <text:p><text:s/>- <text:s text:c="2"/></text:p>
          </table:table-cell>
          <table:table-cell table:style-name="ce343"/>
          <table:table-cell table:style-name="ce343" table:formula="of:=+[.C12]" office:value-type="float" office:value="4853.04" calcext:value-type="float">
            <text:p><text:s/>4,853.04 </text:p>
          </table:table-cell>
          <table:table-cell table:style-name="ce561" table:formula="of:=[.B29]+[.D29]+[.C29]" office:value-type="float" office:value="4853.04" calcext:value-type="float">
            <text:p><text:s/>4,853.04 </text:p>
          </table:table-cell>
          <table:table-cell table:style-name="ce427"/>
          <table:table-cell table:number-columns-repeated="16378"/>
        </table:table-row>
        <table:table-row table:style-name="ro1">
          <table:table-cell table:style-name="ce347" table:formula="of:=+[.A13]" office:value-type="string" office:string-value="TOTAL INVERSIÒN" calcext:value-type="string">
            <text:p>TOTAL INVERSIÒN</text:p>
          </table:table-cell>
          <table:table-cell table:style-name="ce520" table:formula="of:=[.B20]+[.B27]+[.B28]+[.B29]" office:value-type="float" office:value="25695.4453855231" calcext:value-type="float">
            <text:p><text:s/>25,695.45 </text:p>
          </table:table-cell>
          <table:table-cell table:style-name="ce520" table:formula="of:=[.C20]+[.C27]+[.C28]+[.C29]" office:value-type="float" office:value="5000" calcext:value-type="float">
            <text:p><text:s/>5,000.00 </text:p>
          </table:table-cell>
          <table:table-cell table:style-name="ce343" table:formula="of:=[.D20]+[.D27]+[.D28]+[.D29]" office:value-type="float" office:value="109363.12" calcext:value-type="float">
            <text:p><text:s/>109,363.12 </text:p>
          </table:table-cell>
          <table:table-cell table:style-name="ce561" table:formula="of:=[.E20]+[.E27]+[.E28]+[.E29]" office:value-type="float" office:value="140058.565385523" calcext:value-type="float">
            <text:p><text:s/>140,058.57 </text:p>
          </table:table-cell>
          <table:table-cell table:style-name="ce427"/>
          <table:table-cell table:number-columns-repeated="16378"/>
        </table:table-row>
        <table:table-row table:style-name="ro1">
          <table:table-cell table:style-name="ce347" office:value-type="string" calcext:value-type="string">
            <text:p>PORCENTAJE</text:p>
          </table:table-cell>
          <table:table-cell table:style-name="ce525" table:formula="of:=([.B30]/[.$E$30])" office:value-type="percentage" office:value="0.183462148957432" calcext:value-type="percentage">
            <text:p>18.35 %</text:p>
          </table:table-cell>
          <table:table-cell table:style-name="ce525" table:formula="of:=([.C30]/[.$E$30])" office:value-type="percentage" office:value="0.03569935181213" calcext:value-type="percentage">
            <text:p>3.57 %</text:p>
          </table:table-cell>
          <table:table-cell table:style-name="ce525" table:formula="of:=([.D30]/[.$E$30])" office:value-type="percentage" office:value="0.780838499230438" calcext:value-type="percentage">
            <text:p>78.08 %</text:p>
          </table:table-cell>
          <table:table-cell table:style-name="ce563" office:value-type="percentage" office:value="1" calcext:value-type="percentage">
            <text:p>100 %</text:p>
          </table:table-cell>
          <table:table-cell table:style-name="ce427"/>
          <table:table-cell table:number-columns-repeated="16378"/>
        </table:table-row>
        <table:table-row table:style-name="ro1">
          <table:table-cell table:style-name="ce511"/>
          <table:table-cell table:style-name="ce384" table:number-columns-repeated="3"/>
          <table:table-cell table:style-name="ce564"/>
          <table:table-cell table:style-name="ce427" table:number-columns-repeated="2"/>
          <table:table-cell table:number-columns-repeated="16377"/>
        </table:table-row>
        <table:table-row table:style-name="ro1">
          <table:table-cell table:style-name="ce511"/>
          <table:table-cell table:style-name="ce526"/>
          <table:table-cell table:style-name="ce544" table:formula="of:=[.C30]/([.B30]+[.C30])" office:value-type="float" office:value="0.162890615764062" calcext:value-type="float">
            <text:p><text:s/>0.1629 </text:p>
          </table:table-cell>
          <table:table-cell table:style-name="ce384"/>
          <table:table-cell table:style-name="ce564"/>
          <table:table-cell table:style-name="ce427" table:number-columns-repeated="2"/>
          <table:table-cell table:number-columns-repeated="16377"/>
        </table:table-row>
        <table:table-row table:style-name="ro1">
          <table:table-cell table:style-name="ce511"/>
          <table:table-cell table:style-name="ce384" table:number-columns-repeated="3"/>
          <table:table-cell table:style-name="ce564"/>
          <table:table-cell table:style-name="ce427" table:number-columns-repeated="2"/>
          <table:table-cell table:number-columns-repeated="16377"/>
        </table:table-row>
        <table:table-row table:style-name="ro1">
          <table:table-cell table:style-name="ce512" office:value-type="string" calcext:value-type="string">
            <text:p>PRESTAMO</text:p>
          </table:table-cell>
          <table:table-cell table:style-name="ce527" table:formula="of:=[.C30]" office:value-type="float" office:value="5000" calcext:value-type="float">
            <text:p><text:s/>5,000.00 </text:p>
          </table:table-cell>
          <table:table-cell table:style-name="ce384" table:number-columns-repeated="2"/>
          <table:table-cell table:style-name="ce564"/>
          <table:table-cell table:style-name="ce427" table:number-columns-repeated="2"/>
          <table:table-cell table:number-columns-repeated="16377"/>
        </table:table-row>
        <table:table-row table:style-name="ro1">
          <table:table-cell table:style-name="ce513" office:value-type="string" calcext:value-type="string">
            <text:p>APORTE PROCOMPITE+SOCIOS</text:p>
          </table:table-cell>
          <table:table-cell table:style-name="ce528" table:formula="of:=[.B30]+[.D30]" office:value-type="float" office:value="135058.565385523" calcext:value-type="float">
            <text:p><text:s/>135,058.57 </text:p>
          </table:table-cell>
          <table:table-cell table:style-name="ce384" table:number-columns-repeated="2"/>
          <table:table-cell table:style-name="ce564"/>
          <table:table-cell table:style-name="ce427" table:number-columns-repeated="2"/>
          <table:table-cell table:number-columns-repeated="16377"/>
        </table:table-row>
        <table:table-row table:style-name="ro1">
          <table:table-cell table:style-name="ce513" office:value-type="string" calcext:value-type="string">
            <text:p>TOTAL</text:p>
          </table:table-cell>
          <table:table-cell table:style-name="ce529" table:formula="of:=[.B35]+[.B36]" office:value-type="float" office:value="140058.565385523" calcext:value-type="float">
            <text:p><text:s/>140,058.57 </text:p>
          </table:table-cell>
          <table:table-cell table:style-name="ce422" table:formula="of:=+[$INVERSION.F16]" office:value-type="float" office:value="140058.565385523" calcext:value-type="float">
            <text:p>140058.57</text:p>
          </table:table-cell>
          <table:table-cell table:style-name="ce339"/>
          <table:table-cell/>
          <table:table-cell table:style-name="ce344"/>
          <table:table-cell table:style-name="ce427"/>
          <table:table-cell table:number-columns-repeated="16377"/>
        </table:table-row>
        <table:table-row table:style-name="ro1">
          <table:table-cell table:style-name="ce339" table:number-columns-repeated="4"/>
          <table:table-cell table:style-name="ce345"/>
          <table:table-cell table:style-name="ce339"/>
          <table:table-cell table:number-columns-repeated="16378"/>
        </table:table-row>
        <table:table-row table:style-name="ro37">
          <table:table-cell table:style-name="ce514" office:value-type="string" calcext:value-type="string" table:number-columns-spanned="5" table:number-rows-spanned="1">
            <text:p>El aporte del AEO, puede ser valorizado hasta el 90%, en efectivo o ambas opciones, en este caso vamos a considerar para el Caso <text:s/>que el 18.49% es aporte del AEO <text:s/>y el 3.29% de su aporte lo realiza a traves de un credito en una entidad financiera</text:p>
          </table:table-cell>
          <table:covered-table-cell table:number-columns-repeated="3" table:style-name="ce530"/>
          <table:covered-table-cell table:style-name="ce565"/>
          <table:table-cell table:style-name="ce339"/>
          <table:table-cell table:number-columns-repeated="16378"/>
        </table:table-row>
        <table:table-row table:style-name="ro1">
          <table:table-cell table:style-name="ce339" office:value-type="string" calcext:value-type="string">
            <text:p>.</text:p>
          </table:table-cell>
          <table:table-cell table:style-name="ce339" table:number-columns-repeated="5"/>
          <table:table-cell table:number-columns-repeated="16378"/>
        </table:table-row>
        <table:table-row table:style-name="ro1">
          <table:table-cell table:style-name="ce347" office:value-type="string" calcext:value-type="string">
            <text:p>Monto del Prestamo</text:p>
          </table:table-cell>
          <table:table-cell table:style-name="ce531" table:formula="of:=+[.C30]" office:value-type="float" office:value="5000" calcext:value-type="float">
            <text:p><text:s/>5,000.00 </text:p>
          </table:table-cell>
          <table:table-cell table:style-name="ce345"/>
          <table:table-cell table:style-name="ce339" table:number-columns-repeated="3"/>
          <table:table-cell table:number-columns-repeated="16378"/>
        </table:table-row>
        <table:table-row table:style-name="ro1">
          <table:table-cell table:style-name="ce347" office:value-type="string" calcext:value-type="string">
            <text:p>Tasa Efectiva Anual</text:p>
          </table:table-cell>
          <table:table-cell table:style-name="ce532" office:value-type="percentage" office:value="0.15" calcext:value-type="percentage">
            <text:p>15 %</text:p>
          </table:table-cell>
          <table:table-cell table:style-name="ce545"/>
          <table:table-cell table:style-name="ce339" table:number-columns-repeated="3"/>
          <table:table-cell table:number-columns-repeated="16378"/>
        </table:table-row>
        <table:table-row table:style-name="ro1">
          <table:table-cell table:style-name="ce347" office:value-type="string" calcext:value-type="string">
            <text:p>Tasa de Interes Mensual</text:p>
          </table:table-cell>
          <table:table-cell table:style-name="ce533" table:formula="of:=(1+[.B42])^(1/12)-1" office:value-type="percentage" office:value="0.0117149169198534" calcext:value-type="percentage">
            <text:p>1.17 %</text:p>
          </table:table-cell>
          <table:table-cell table:style-name="ce339" table:number-columns-repeated="4"/>
          <table:table-cell table:number-columns-repeated="16378"/>
        </table:table-row>
        <table:table-row table:style-name="ro1">
          <table:table-cell table:style-name="ce515" office:value-type="string" calcext:value-type="string">
            <text:p>Numero de meses</text:p>
          </table:table-cell>
          <table:table-cell table:style-name="ce337" office:value-type="float" office:value="12" calcext:value-type="float">
            <text:p>12</text:p>
          </table:table-cell>
          <table:table-cell table:style-name="ce339" table:number-columns-repeated="4"/>
          <table:table-cell table:number-columns-repeated="16378"/>
        </table:table-row>
        <table:table-row table:style-name="ro1">
          <table:table-cell table:style-name="ce515" office:value-type="string" calcext:value-type="string">
            <text:p>Cuota mensual a pagar</text:p>
          </table:table-cell>
          <table:table-cell table:style-name="ce534" table:formula="of:=PMT([.B43];[.B44];[.B41])" office:value-type="float" office:value="-449.071815261043" calcext:value-type="float">
            <text:p>S/. -449.07</text:p>
          </table:table-cell>
          <table:table-cell table:style-name="ce546" table:formula="of:=[.B41]*[.B43]/(1-(1+[.B43])^-[.B44])" office:value-type="float" office:value="449.071815261042" calcext:value-type="float">
            <text:p><text:s/>449.07 </text:p>
          </table:table-cell>
          <table:table-cell/>
          <table:table-cell table:style-name="ce339" table:number-columns-repeated="2"/>
          <table:table-cell table:number-columns-repeated="16378"/>
        </table:table-row>
        <table:table-row table:style-name="ro38">
          <table:table-cell table:style-name="ce378"/>
          <table:table-cell table:style-name="ce535"/>
          <table:table-cell table:style-name="ce546"/>
          <table:table-cell/>
          <table:table-cell table:style-name="ce339" table:number-columns-repeated="2"/>
          <table:table-cell table:number-columns-repeated="16378"/>
        </table:table-row>
        <table:table-row table:style-name="ro39">
          <table:table-cell table:style-name="ce378"/>
          <table:table-cell table:style-name="ce535"/>
          <table:table-cell table:style-name="ce546"/>
          <table:table-cell/>
          <table:table-cell table:style-name="ce339" table:number-columns-repeated="2"/>
          <table:table-cell table:number-columns-repeated="16378"/>
        </table:table-row>
        <table:table-row table:style-name="ro1">
          <table:table-cell table:style-name="ce516"/>
          <table:table-cell table:style-name="ce536" office:value-type="string" calcext:value-type="string">
            <text:p>CUADRO DE SERVICIO A LA DEUDA</text:p>
          </table:table-cell>
          <table:table-cell table:style-name="ce536"/>
          <table:table-cell table:style-name="ce516"/>
          <table:table-cell table:style-name="ce339" table:number-columns-repeated="2"/>
          <table:table-cell table:number-columns-repeated="16378"/>
        </table:table-row>
        <table:table-row table:style-name="ro1">
          <table:table-cell table:style-name="ce517" office:value-type="string" calcext:value-type="string">
            <text:p>PERIODO</text:p>
          </table:table-cell>
          <table:table-cell table:style-name="ce537" office:value-type="string" calcext:value-type="string">
            <text:p>AÑO 1</text:p>
          </table:table-cell>
          <table:table-cell table:style-name="ce537" office:value-type="string" calcext:value-type="string">
            <text:p>AÑO 2</text:p>
          </table:table-cell>
          <table:table-cell table:style-name="ce537" office:value-type="string" calcext:value-type="string">
            <text:p>AÑO 3</text:p>
          </table:table-cell>
          <table:table-cell table:style-name="ce339" table:number-columns-repeated="2"/>
          <table:table-cell table:number-columns-repeated="16378"/>
        </table:table-row>
        <table:table-row table:style-name="ro1">
          <table:table-cell table:style-name="ce337" office:value-type="string" calcext:value-type="string">
            <text:p>SALDO INICIAL</text:p>
          </table:table-cell>
          <table:table-cell table:style-name="ce538" table:formula="of:=[.B62]" office:value-type="float" office:value="5000" calcext:value-type="float">
            <text:p><text:s/>5,000.00 </text:p>
          </table:table-cell>
          <table:table-cell table:style-name="ce547" table:number-columns-repeated="2"/>
          <table:table-cell table:style-name="ce339" table:number-columns-repeated="2"/>
          <table:table-cell table:number-columns-repeated="16378"/>
        </table:table-row>
        <table:table-row table:style-name="ro1">
          <table:table-cell table:style-name="ce337" office:value-type="string" calcext:value-type="string">
            <text:p>AMORTIZACION</text:p>
          </table:table-cell>
          <table:table-cell table:style-name="ce539" table:formula="of:=[.B53]-[.B52]" office:value-type="float" office:value="4999.99999999999" calcext:value-type="float">
            <text:p><text:s/>5,000.00 </text:p>
          </table:table-cell>
          <table:table-cell table:style-name="ce547" table:number-columns-repeated="2"/>
          <table:table-cell table:style-name="ce339" table:number-columns-repeated="2"/>
          <table:table-cell table:number-columns-repeated="16378"/>
        </table:table-row>
        <table:table-row table:style-name="ro1">
          <table:table-cell table:style-name="ce337" office:value-type="string" calcext:value-type="string">
            <text:p>INTERESES</text:p>
          </table:table-cell>
          <table:table-cell table:style-name="ce538" table:formula="of:=SUM([.D62:.D73])" office:value-type="float" office:value="388.861783132515" calcext:value-type="float">
            <text:p><text:s/>388.86 </text:p>
          </table:table-cell>
          <table:table-cell table:style-name="ce548" table:number-columns-repeated="2"/>
          <table:table-cell table:style-name="ce339" table:number-columns-repeated="2"/>
          <table:table-cell table:number-columns-repeated="16378"/>
        </table:table-row>
        <table:table-row table:style-name="ro1">
          <table:table-cell table:style-name="ce337" office:value-type="string" calcext:value-type="string">
            <text:p>CUOTA</text:p>
          </table:table-cell>
          <table:table-cell table:style-name="ce540" table:formula="of:=SUM([.E62:.E73])" office:value-type="float" office:value="5388.86178313251" calcext:value-type="float">
            <text:p>5,388.86 </text:p>
          </table:table-cell>
          <table:table-cell table:style-name="ce549" table:number-columns-repeated="2"/>
          <table:table-cell table:style-name="ce339" table:number-columns-repeated="2"/>
          <table:table-cell table:number-columns-repeated="16378"/>
        </table:table-row>
        <table:table-row table:style-name="ro1">
          <table:table-cell table:style-name="ce337" office:value-type="string" calcext:value-type="string">
            <text:p>SALDO FINAL</text:p>
          </table:table-cell>
          <table:table-cell table:style-name="ce539" table:formula="of:=[.B50]-[.B51]" office:value-type="float" office:value="0" calcext:value-type="float">
            <text:p><text:s/>- <text:s text:c="2"/></text:p>
          </table:table-cell>
          <table:table-cell table:style-name="ce547" table:number-columns-repeated="2"/>
          <table:table-cell table:style-name="ce339" table:number-columns-repeated="2"/>
          <table:table-cell table:number-columns-repeated="16378"/>
        </table:table-row>
        <table:table-row table:style-name="ro1">
          <table:table-cell table:style-name="ce337" office:value-type="string" calcext:value-type="string">
            <text:p>ESCUDO FISCAL</text:p>
          </table:table-cell>
          <table:table-cell table:style-name="ce539" table:formula="of:=0.3*[.B52]" office:value-type="float" office:value="116.658534939754" calcext:value-type="float">
            <text:p><text:s/>116.66 </text:p>
          </table:table-cell>
          <table:table-cell table:style-name="ce547" table:number-columns-repeated="2"/>
          <table:table-cell table:style-name="ce339" table:number-columns-repeated="2"/>
          <table:table-cell table:number-columns-repeated="16378"/>
        </table:table-row>
        <table:table-row table:style-name="ro1">
          <table:table-cell table:style-name="ce378"/>
          <table:table-cell table:style-name="ce535"/>
          <table:table-cell table:style-name="ce546"/>
          <table:table-cell/>
          <table:table-cell table:style-name="ce339" table:number-columns-repeated="2"/>
          <table:table-cell table:number-columns-repeated="16378"/>
        </table:table-row>
        <table:table-row table:style-name="ro1" table:number-rows-repeated="2">
          <table:table-cell table:style-name="ce339" table:number-columns-repeated="6"/>
          <table:table-cell table:number-columns-repeated="16378"/>
        </table:table-row>
        <table:table-row table:style-name="ro1">
          <table:table-cell table:style-name="ce339"/>
          <table:table-cell table:style-name="ce339" office:value-type="string" calcext:value-type="string">
            <text:p>CUADRO DE SERVICIO A LA DEUDA</text:p>
          </table:table-cell>
          <table:table-cell table:style-name="ce339" table:number-columns-repeated="4"/>
          <table:table-cell table:number-columns-repeated="16378"/>
        </table:table-row>
        <table:table-row table:style-name="ro1">
          <table:table-cell table:style-name="ce339" table:number-columns-repeated="6"/>
          <table:table-cell table:number-columns-repeated="16378"/>
        </table:table-row>
        <table:table-row table:style-name="ro1">
          <table:table-cell table:style-name="ce518" office:value-type="string" calcext:value-type="string">
            <text:p>Periodos</text:p>
          </table:table-cell>
          <table:table-cell table:style-name="ce541" office:value-type="string" calcext:value-type="string">
            <text:p>Saldo Inicial</text:p>
          </table:table-cell>
          <table:table-cell table:style-name="ce541" office:value-type="string" calcext:value-type="string">
            <text:p>Amortizacion</text:p>
          </table:table-cell>
          <table:table-cell table:style-name="ce541" office:value-type="string" calcext:value-type="string">
            <text:p>Intereses</text:p>
          </table:table-cell>
          <table:table-cell table:style-name="ce541" office:value-type="string" calcext:value-type="string">
            <text:p>Cuota</text:p>
          </table:table-cell>
          <table:table-cell table:style-name="ce376" office:value-type="string" calcext:value-type="string">
            <text:p>Saldo Final</text:p>
          </table:table-cell>
          <table:table-cell table:style-name="ce376" office:value-type="string" calcext:value-type="string">
            <text:p>Escudo Fiscal</text:p>
          </table:table-cell>
          <table:table-cell/>
          <table:table-cell table:style-name="ce359"/>
          <table:table-cell table:number-columns-repeated="16375"/>
        </table:table-row>
        <table:table-row table:style-name="ro1">
          <table:table-cell table:style-name="ce518" office:value-type="float" office:value="1" calcext:value-type="float">
            <text:p>1</text:p>
          </table:table-cell>
          <table:table-cell table:style-name="ce385" table:formula="of:=[.B41]" office:value-type="float" office:value="5000" calcext:value-type="float">
            <text:p><text:s/>5,000.00 </text:p>
          </table:table-cell>
          <table:table-cell table:style-name="ce385" table:formula="of:=[.E62]-[.D62]" office:value-type="float" office:value="390.497230661775" calcext:value-type="float">
            <text:p><text:s/>390.50 </text:p>
          </table:table-cell>
          <table:table-cell table:style-name="ce385" table:formula="of:=[.B62]*[.$B$43]" office:value-type="float" office:value="58.5745845992669" calcext:value-type="float">
            <text:p><text:s/>58.57 </text:p>
          </table:table-cell>
          <table:table-cell table:style-name="ce385" table:formula="of:=[.$C$45]" office:value-type="float" office:value="449.071815261042" calcext:value-type="float">
            <text:p><text:s/>449.07 </text:p>
          </table:table-cell>
          <table:table-cell table:style-name="ce385" table:formula="of:=[.B62]-[.C62]" office:value-type="float" office:value="4609.50276933822" calcext:value-type="float">
            <text:p><text:s/>4,609.50 </text:p>
          </table:table-cell>
          <table:table-cell table:style-name="ce427" table:formula="of:=[.D62]*0.3" office:value-type="float" office:value="17.5723753797801" calcext:value-type="float">
            <text:p><text:s/>17.57 </text:p>
          </table:table-cell>
          <table:table-cell table:number-columns-repeated="16377"/>
        </table:table-row>
        <table:table-row table:style-name="ro1">
          <table:table-cell table:style-name="ce518" office:value-type="float" office:value="2" calcext:value-type="float">
            <text:p>2</text:p>
          </table:table-cell>
          <table:table-cell table:style-name="ce385" table:formula="of:=[.F62]" office:value-type="float" office:value="4609.50276933822" calcext:value-type="float">
            <text:p><text:s/>4,609.50 </text:p>
          </table:table-cell>
          <table:table-cell table:style-name="ce385" table:formula="of:=[.E63]-[.D63]" office:value-type="float" office:value="395.071873276411" calcext:value-type="float">
            <text:p><text:s/>395.07 </text:p>
          </table:table-cell>
          <table:table-cell table:style-name="ce385" table:formula="of:=[.B63]*[.$B$43]" office:value-type="float" office:value="53.9999419846314" calcext:value-type="float">
            <text:p><text:s/>54.00 </text:p>
          </table:table-cell>
          <table:table-cell table:style-name="ce385" table:formula="of:=[.$C$45]" office:value-type="float" office:value="449.071815261042" calcext:value-type="float">
            <text:p><text:s/>449.07 </text:p>
          </table:table-cell>
          <table:table-cell table:style-name="ce385" table:formula="of:=[.B63]-[.C63]" office:value-type="float" office:value="4214.43089606181" calcext:value-type="float">
            <text:p><text:s/>4,214.43 </text:p>
          </table:table-cell>
          <table:table-cell table:style-name="ce427" table:formula="of:=[.D63]*0.3" office:value-type="float" office:value="16.1999825953894" calcext:value-type="float">
            <text:p><text:s/>16.20 </text:p>
          </table:table-cell>
          <table:table-cell table:number-columns-repeated="16377"/>
        </table:table-row>
        <table:table-row table:style-name="ro1">
          <table:table-cell table:style-name="ce518" office:value-type="float" office:value="3" calcext:value-type="float">
            <text:p>3</text:p>
          </table:table-cell>
          <table:table-cell table:style-name="ce385" table:formula="of:=[.F63]" office:value-type="float" office:value="4214.43089606181" calcext:value-type="float">
            <text:p><text:s/>4,214.43 </text:p>
          </table:table-cell>
          <table:table-cell table:style-name="ce385" table:formula="of:=[.E64]-[.D64]" office:value-type="float" office:value="399.700107449215" calcext:value-type="float">
            <text:p><text:s/>399.70 </text:p>
          </table:table-cell>
          <table:table-cell table:style-name="ce385" table:formula="of:=[.B64]*[.$B$43]" office:value-type="float" office:value="49.3717078118274" calcext:value-type="float">
            <text:p><text:s/>49.37 </text:p>
          </table:table-cell>
          <table:table-cell table:style-name="ce385" table:formula="of:=[.$C$45]" office:value-type="float" office:value="449.071815261042" calcext:value-type="float">
            <text:p><text:s/>449.07 </text:p>
          </table:table-cell>
          <table:table-cell table:style-name="ce385" table:formula="of:=[.B64]-[.C64]" office:value-type="float" office:value="3814.7307886126" calcext:value-type="float">
            <text:p><text:s/>3,814.73 </text:p>
          </table:table-cell>
          <table:table-cell table:style-name="ce427" table:formula="of:=[.D64]*0.3" office:value-type="float" office:value="14.8115123435482" calcext:value-type="float">
            <text:p><text:s/>14.81 </text:p>
          </table:table-cell>
          <table:table-cell table:number-columns-repeated="16377"/>
        </table:table-row>
        <table:table-row table:style-name="ro1">
          <table:table-cell table:style-name="ce518" office:value-type="float" office:value="4" calcext:value-type="float">
            <text:p>4</text:p>
          </table:table-cell>
          <table:table-cell table:style-name="ce385" table:formula="of:=[.F64]" office:value-type="float" office:value="3814.7307886126" calcext:value-type="float">
            <text:p><text:s/>3,814.73 </text:p>
          </table:table-cell>
          <table:table-cell table:style-name="ce385" table:formula="of:=[.E65]-[.D65]" office:value-type="float" office:value="404.382561000839" calcext:value-type="float">
            <text:p><text:s/>404.38 </text:p>
          </table:table-cell>
          <table:table-cell table:style-name="ce385" table:formula="of:=[.B65]*[.$B$43]" office:value-type="float" office:value="44.6892542602034" calcext:value-type="float">
            <text:p><text:s/>44.69 </text:p>
          </table:table-cell>
          <table:table-cell table:style-name="ce385" table:formula="of:=[.$C$45]" office:value-type="float" office:value="449.071815261042" calcext:value-type="float">
            <text:p><text:s/>449.07 </text:p>
          </table:table-cell>
          <table:table-cell table:style-name="ce385" table:formula="of:=[.B65]-[.C65]" office:value-type="float" office:value="3410.34822761176" calcext:value-type="float">
            <text:p><text:s/>3,410.35 </text:p>
          </table:table-cell>
          <table:table-cell table:style-name="ce427" table:formula="of:=[.D65]*0.3" office:value-type="float" office:value="13.406776278061" calcext:value-type="float">
            <text:p><text:s/>13.41 </text:p>
          </table:table-cell>
          <table:table-cell table:number-columns-repeated="16377"/>
        </table:table-row>
        <table:table-row table:style-name="ro1">
          <table:table-cell table:style-name="ce518" office:value-type="float" office:value="5" calcext:value-type="float">
            <text:p>5</text:p>
          </table:table-cell>
          <table:table-cell table:style-name="ce385" table:formula="of:=[.F65]" office:value-type="float" office:value="3410.34822761176" calcext:value-type="float">
            <text:p><text:s/>3,410.35 </text:p>
          </table:table-cell>
          <table:table-cell table:style-name="ce385" table:formula="of:=[.E66]-[.D66]" office:value-type="float" office:value="409.119869106801" calcext:value-type="float">
            <text:p><text:s/>409.12 </text:p>
          </table:table-cell>
          <table:table-cell table:style-name="ce385" table:formula="of:=[.B66]*[.$B$43]" office:value-type="float" office:value="39.951946154241" calcext:value-type="float">
            <text:p><text:s/>39.95 </text:p>
          </table:table-cell>
          <table:table-cell table:style-name="ce385" table:formula="of:=[.$C$45]" office:value-type="float" office:value="449.071815261042" calcext:value-type="float">
            <text:p><text:s/>449.07 </text:p>
          </table:table-cell>
          <table:table-cell table:style-name="ce385" table:formula="of:=[.B66]-[.C66]" office:value-type="float" office:value="3001.22835850496" calcext:value-type="float">
            <text:p><text:s/>3,001.23 </text:p>
          </table:table-cell>
          <table:table-cell table:style-name="ce427" table:formula="of:=[.D66]*0.3" office:value-type="float" office:value="11.9855838462723" calcext:value-type="float">
            <text:p><text:s/>11.99 </text:p>
          </table:table-cell>
          <table:table-cell table:number-columns-repeated="16377"/>
        </table:table-row>
        <table:table-row table:style-name="ro1">
          <table:table-cell table:style-name="ce518" office:value-type="float" office:value="6" calcext:value-type="float">
            <text:p>6</text:p>
          </table:table-cell>
          <table:table-cell table:style-name="ce385" table:formula="of:=[.F66]" office:value-type="float" office:value="3001.22835850496" calcext:value-type="float">
            <text:p><text:s/>3,001.23 </text:p>
          </table:table-cell>
          <table:table-cell table:style-name="ce385" table:formula="of:=[.E67]-[.D67]" office:value-type="float" office:value="413.912674383649" calcext:value-type="float">
            <text:p><text:s/>413.91 </text:p>
          </table:table-cell>
          <table:table-cell table:style-name="ce385" table:formula="of:=[.B67]*[.$B$43]" office:value-type="float" office:value="35.1591408773935" calcext:value-type="float">
            <text:p><text:s/>35.16 </text:p>
          </table:table-cell>
          <table:table-cell table:style-name="ce385" table:formula="of:=[.$C$45]" office:value-type="float" office:value="449.071815261042" calcext:value-type="float">
            <text:p><text:s/>449.07 </text:p>
          </table:table-cell>
          <table:table-cell table:style-name="ce385" table:formula="of:=[.B67]-[.C67]" office:value-type="float" office:value="2587.31568412131" calcext:value-type="float">
            <text:p><text:s/>2,587.32 </text:p>
          </table:table-cell>
          <table:table-cell table:style-name="ce427" table:formula="of:=[.D67]*0.3" office:value-type="float" office:value="10.5477422632181" calcext:value-type="float">
            <text:p><text:s/>10.55 </text:p>
          </table:table-cell>
          <table:table-cell table:number-columns-repeated="16377"/>
        </table:table-row>
        <table:table-row table:style-name="ro1">
          <table:table-cell table:style-name="ce518" office:value-type="float" office:value="7" calcext:value-type="float">
            <text:p>7</text:p>
          </table:table-cell>
          <table:table-cell table:style-name="ce385" table:formula="of:=[.F67]" office:value-type="float" office:value="2587.31568412131" calcext:value-type="float">
            <text:p><text:s/>2,587.32 </text:p>
          </table:table-cell>
          <table:table-cell table:style-name="ce385" table:formula="of:=[.E68]-[.D68]" office:value-type="float" office:value="418.761626976128" calcext:value-type="float">
            <text:p><text:s/>418.76 </text:p>
          </table:table-cell>
          <table:table-cell table:style-name="ce385" table:formula="of:=[.B68]*[.$B$43]" office:value-type="float" office:value="30.3101882849148" calcext:value-type="float">
            <text:p><text:s/>30.31 </text:p>
          </table:table-cell>
          <table:table-cell table:style-name="ce385" table:formula="of:=[.$C$45]" office:value-type="float" office:value="449.071815261042" calcext:value-type="float">
            <text:p><text:s/>449.07 </text:p>
          </table:table-cell>
          <table:table-cell table:style-name="ce385" table:formula="of:=[.B68]-[.C68]" office:value-type="float" office:value="2168.55405714518" calcext:value-type="float">
            <text:p><text:s/>2,168.55 </text:p>
          </table:table-cell>
          <table:table-cell table:style-name="ce427" table:formula="of:=[.D68]*0.3" office:value-type="float" office:value="9.09305648547443" calcext:value-type="float">
            <text:p><text:s/>9.09 </text:p>
          </table:table-cell>
          <table:table-cell table:number-columns-repeated="16377"/>
        </table:table-row>
        <table:table-row table:style-name="ro1">
          <table:table-cell table:style-name="ce518" office:value-type="float" office:value="8" calcext:value-type="float">
            <text:p>8</text:p>
          </table:table-cell>
          <table:table-cell table:style-name="ce385" table:formula="of:=[.F68]" office:value-type="float" office:value="2168.55405714518" calcext:value-type="float">
            <text:p><text:s/>2,168.55 </text:p>
          </table:table-cell>
          <table:table-cell table:style-name="ce385" table:formula="of:=[.E69]-[.D69]" office:value-type="float" office:value="423.667384645376" calcext:value-type="float">
            <text:p><text:s/>423.67 </text:p>
          </table:table-cell>
          <table:table-cell table:style-name="ce385" table:formula="of:=[.B69]*[.$B$43]" office:value-type="float" office:value="25.4044306156668" calcext:value-type="float">
            <text:p><text:s/>25.40 </text:p>
          </table:table-cell>
          <table:table-cell table:style-name="ce385" table:formula="of:=[.$C$45]" office:value-type="float" office:value="449.071815261042" calcext:value-type="float">
            <text:p><text:s/>449.07 </text:p>
          </table:table-cell>
          <table:table-cell table:style-name="ce385" table:formula="of:=[.B69]-[.C69]" office:value-type="float" office:value="1744.88667249981" calcext:value-type="float">
            <text:p><text:s/>1,744.89 </text:p>
          </table:table-cell>
          <table:table-cell table:style-name="ce427" table:formula="of:=[.D69]*0.3" office:value-type="float" office:value="7.62132918470004" calcext:value-type="float">
            <text:p><text:s/>7.62 </text:p>
          </table:table-cell>
          <table:table-cell table:number-columns-repeated="16377"/>
        </table:table-row>
        <table:table-row table:style-name="ro1">
          <table:table-cell table:style-name="ce518" office:value-type="float" office:value="9" calcext:value-type="float">
            <text:p>9</text:p>
          </table:table-cell>
          <table:table-cell table:style-name="ce385" table:formula="of:=[.F69]" office:value-type="float" office:value="1744.88667249981" calcext:value-type="float">
            <text:p><text:s/>1,744.89 </text:p>
          </table:table-cell>
          <table:table-cell table:style-name="ce385" table:formula="of:=[.E70]-[.D70]" office:value-type="float" office:value="428.630612858148" calcext:value-type="float">
            <text:p><text:s/>428.63 </text:p>
          </table:table-cell>
          <table:table-cell table:style-name="ce385" table:formula="of:=[.B70]*[.$B$43]" office:value-type="float" office:value="20.4412024028947" calcext:value-type="float">
            <text:p><text:s/>20.44 </text:p>
          </table:table-cell>
          <table:table-cell table:style-name="ce385" table:formula="of:=[.$C$45]" office:value-type="float" office:value="449.071815261042" calcext:value-type="float">
            <text:p><text:s/>449.07 </text:p>
          </table:table-cell>
          <table:table-cell table:style-name="ce385" table:formula="of:=[.B70]-[.C70]" office:value-type="float" office:value="1316.25605964166" calcext:value-type="float">
            <text:p><text:s/>1,316.26 </text:p>
          </table:table-cell>
          <table:table-cell table:style-name="ce427" table:formula="of:=[.D70]*0.3" office:value-type="float" office:value="6.1323607208684" calcext:value-type="float">
            <text:p><text:s/>6.13 </text:p>
          </table:table-cell>
          <table:table-cell table:number-columns-repeated="16377"/>
        </table:table-row>
        <table:table-row table:style-name="ro1">
          <table:table-cell table:style-name="ce518" office:value-type="float" office:value="10" calcext:value-type="float">
            <text:p>10</text:p>
          </table:table-cell>
          <table:table-cell table:style-name="ce385" table:formula="of:=[.F70]" office:value-type="float" office:value="1316.25605964166" calcext:value-type="float">
            <text:p><text:s/>1,316.26 </text:p>
          </table:table-cell>
          <table:table-cell table:style-name="ce385" table:formula="of:=[.E71]-[.D71]" office:value-type="float" office:value="433.651984877087" calcext:value-type="float">
            <text:p><text:s/>433.65 </text:p>
          </table:table-cell>
          <table:table-cell table:style-name="ce385" table:formula="of:=[.B71]*[.$B$43]" office:value-type="float" office:value="15.4198303839556" calcext:value-type="float">
            <text:p><text:s/>15.42 </text:p>
          </table:table-cell>
          <table:table-cell table:style-name="ce385" table:formula="of:=[.$C$45]" office:value-type="float" office:value="449.071815261042" calcext:value-type="float">
            <text:p><text:s/>449.07 </text:p>
          </table:table-cell>
          <table:table-cell table:style-name="ce385" table:formula="of:=[.B71]-[.C71]" office:value-type="float" office:value="882.604074764573" calcext:value-type="float">
            <text:p><text:s/>882.60 </text:p>
          </table:table-cell>
          <table:table-cell table:style-name="ce427" table:formula="of:=[.D71]*0.3" office:value-type="float" office:value="4.62594911518668" calcext:value-type="float">
            <text:p><text:s/>4.63 </text:p>
          </table:table-cell>
          <table:table-cell table:number-columns-repeated="16377"/>
        </table:table-row>
        <table:table-row table:style-name="ro1">
          <table:table-cell table:style-name="ce518" office:value-type="float" office:value="11" calcext:value-type="float">
            <text:p>11</text:p>
          </table:table-cell>
          <table:table-cell table:style-name="ce385" table:formula="of:=[.F71]" office:value-type="float" office:value="882.604074764573" calcext:value-type="float">
            <text:p><text:s/>882.60 </text:p>
          </table:table-cell>
          <table:table-cell table:style-name="ce385" table:formula="of:=[.E72]-[.D72]" office:value-type="float" office:value="438.732181852051" calcext:value-type="float">
            <text:p><text:s/>438.73 </text:p>
          </table:table-cell>
          <table:table-cell table:style-name="ce385" table:formula="of:=[.B72]*[.$B$43]" office:value-type="float" office:value="10.339633408991" calcext:value-type="float">
            <text:p><text:s/>10.34 </text:p>
          </table:table-cell>
          <table:table-cell table:style-name="ce385" table:formula="of:=[.$C$45]" office:value-type="float" office:value="449.071815261042" calcext:value-type="float">
            <text:p><text:s/>449.07 </text:p>
          </table:table-cell>
          <table:table-cell table:style-name="ce385" table:formula="of:=[.B72]-[.C72]" office:value-type="float" office:value="443.871892912521" calcext:value-type="float">
            <text:p><text:s/>443.87 </text:p>
          </table:table-cell>
          <table:table-cell table:style-name="ce427" table:formula="of:=[.D72]*0.3" office:value-type="float" office:value="3.10189002269731" calcext:value-type="float">
            <text:p><text:s/>3.10 </text:p>
          </table:table-cell>
          <table:table-cell table:number-columns-repeated="16377"/>
        </table:table-row>
        <table:table-row table:style-name="ro1">
          <table:table-cell table:style-name="ce518" office:value-type="float" office:value="12" calcext:value-type="float">
            <text:p>12</text:p>
          </table:table-cell>
          <table:table-cell table:style-name="ce385" table:formula="of:=[.F72]" office:value-type="float" office:value="443.871892912521" calcext:value-type="float">
            <text:p><text:s/>443.87 </text:p>
          </table:table-cell>
          <table:table-cell table:style-name="ce385" table:formula="of:=[.E73]-[.D73]" office:value-type="float" office:value="443.871892912514" calcext:value-type="float">
            <text:p><text:s/>443.87 </text:p>
          </table:table-cell>
          <table:table-cell table:style-name="ce385" table:formula="of:=[.B73]*[.$B$43]" office:value-type="float" office:value="5.19992234852824" calcext:value-type="float">
            <text:p><text:s/>5.20 </text:p>
          </table:table-cell>
          <table:table-cell table:style-name="ce385" table:formula="of:=[.$C$45]" office:value-type="float" office:value="449.071815261042" calcext:value-type="float">
            <text:p><text:s/>449.07 </text:p>
          </table:table-cell>
          <table:table-cell table:style-name="ce385" table:formula="of:=[.B73]-[.C73]" office:value-type="float" office:value="0.00000000000704858393874019" calcext:value-type="float">
            <text:p><text:s/>0.00 </text:p>
          </table:table-cell>
          <table:table-cell table:style-name="ce427" table:formula="of:=[.D73]*0.3" office:value-type="float" office:value="1.55997670455847" calcext:value-type="float">
            <text:p><text:s/>1.56 </text:p>
          </table:table-cell>
          <table:table-cell table:number-columns-repeated="16377"/>
        </table:table-row>
        <table:table-row table:style-name="ro1">
          <table:table-cell table:style-name="ce518" office:value-type="float" office:value="13" calcext:value-type="float">
            <text:p>13</text:p>
          </table:table-cell>
          <table:table-cell table:style-name="ce385" table:formula="of:=[.F73]" office:value-type="float" office:value="0.00000000000704858393874019" calcext:value-type="float">
            <text:p><text:s/>0.00 </text:p>
          </table:table-cell>
          <table:table-cell table:style-name="ce385" table:formula="of:=[.E74]-[.D74]" office:value-type="float" office:value="449.071815261042" calcext:value-type="float">
            <text:p><text:s/>449.07 </text:p>
          </table:table-cell>
          <table:table-cell table:style-name="ce385" table:formula="of:=[.B74]*[.$B$43]" office:value-type="float" office:value="0.0000000000000825735752449543" calcext:value-type="float">
            <text:p><text:s/>0.00 </text:p>
          </table:table-cell>
          <table:table-cell table:style-name="ce385" table:formula="of:=[.$C$45]" office:value-type="float" office:value="449.071815261042" calcext:value-type="float">
            <text:p><text:s/>449.07 </text:p>
          </table:table-cell>
          <table:table-cell table:style-name="ce385" table:formula="of:=[.B74]-[.C74]" office:value-type="float" office:value="-449.071815261035" calcext:value-type="float">
            <text:p><text:s/>(449.07)</text:p>
          </table:table-cell>
          <table:table-cell table:style-name="ce427" table:formula="of:=[.D74]*0.3" office:value-type="float" office:value="0.0000000000000247720725734863" calcext:value-type="float">
            <text:p><text:s/>0.00 </text:p>
          </table:table-cell>
          <table:table-cell table:number-columns-repeated="16377"/>
        </table:table-row>
        <table:table-row table:style-name="ro1">
          <table:table-cell table:style-name="ce518" office:value-type="float" office:value="14" calcext:value-type="float">
            <text:p>14</text:p>
          </table:table-cell>
          <table:table-cell table:style-name="ce385" table:formula="of:=[.F74]" office:value-type="float" office:value="-449.071815261035" calcext:value-type="float">
            <text:p><text:s/>(449.07)</text:p>
          </table:table-cell>
          <table:table-cell table:style-name="ce385" table:formula="of:=[.E75]-[.D75]" office:value-type="float" office:value="454.332654267873" calcext:value-type="float">
            <text:p><text:s/>454.33 </text:p>
          </table:table-cell>
          <table:table-cell table:style-name="ce385" table:formula="of:=[.B75]*[.$B$43]" office:value-type="float" office:value="-5.26083900683077" calcext:value-type="float">
            <text:p><text:s/>(5.26)</text:p>
          </table:table-cell>
          <table:table-cell table:style-name="ce385" table:formula="of:=[.$C$45]" office:value-type="float" office:value="449.071815261042" calcext:value-type="float">
            <text:p><text:s/>449.07 </text:p>
          </table:table-cell>
          <table:table-cell table:style-name="ce385" table:formula="of:=[.B75]-[.C75]" office:value-type="float" office:value="-903.404469528908" calcext:value-type="float">
            <text:p><text:s/>(903.40)</text:p>
          </table:table-cell>
          <table:table-cell table:style-name="ce427" table:formula="of:=[.D75]*0.3" office:value-type="float" office:value="-1.57825170204923" calcext:value-type="float">
            <text:p><text:s/>-1.58 </text:p>
          </table:table-cell>
          <table:table-cell table:number-columns-repeated="16377"/>
        </table:table-row>
        <table:table-row table:style-name="ro1">
          <table:table-cell table:style-name="ce518" office:value-type="float" office:value="15" calcext:value-type="float">
            <text:p>15</text:p>
          </table:table-cell>
          <table:table-cell table:style-name="ce385" table:formula="of:=[.F75]" office:value-type="float" office:value="-903.404469528908" calcext:value-type="float">
            <text:p><text:s/>(903.40)</text:p>
          </table:table-cell>
          <table:table-cell table:style-name="ce385" table:formula="of:=[.E76]-[.D76]" office:value-type="float" office:value="459.655123566598" calcext:value-type="float">
            <text:p><text:s/>459.66 </text:p>
          </table:table-cell>
          <table:table-cell table:style-name="ce385" table:formula="of:=[.B76]*[.$B$43]" office:value-type="float" office:value="-10.5833083055554" calcext:value-type="float">
            <text:p><text:s/>(10.58)</text:p>
          </table:table-cell>
          <table:table-cell table:style-name="ce385" table:formula="of:=[.$C$45]" office:value-type="float" office:value="449.071815261042" calcext:value-type="float">
            <text:p><text:s/>449.07 </text:p>
          </table:table-cell>
          <table:table-cell table:style-name="ce385" table:formula="of:=[.B76]-[.C76]" office:value-type="float" office:value="-1363.05959309551" calcext:value-type="float">
            <text:p><text:s/>(1,363.06)</text:p>
          </table:table-cell>
          <table:table-cell table:style-name="ce427" table:formula="of:=[.D76]*0.3" office:value-type="float" office:value="-3.17499249166661" calcext:value-type="float">
            <text:p><text:s/>-3.17 </text:p>
          </table:table-cell>
          <table:table-cell table:number-columns-repeated="16377"/>
        </table:table-row>
        <table:table-row table:style-name="ro1">
          <table:table-cell table:style-name="ce518" office:value-type="float" office:value="16" calcext:value-type="float">
            <text:p>16</text:p>
          </table:table-cell>
          <table:table-cell table:style-name="ce385" table:formula="of:=[.F76]" office:value-type="float" office:value="-1363.05959309551" calcext:value-type="float">
            <text:p><text:s/>(1,363.06)</text:p>
          </table:table-cell>
          <table:table-cell table:style-name="ce385" table:formula="of:=[.E77]-[.D77]" office:value-type="float" office:value="465.039945150965" calcext:value-type="float">
            <text:p><text:s/>465.04 </text:p>
          </table:table-cell>
          <table:table-cell table:style-name="ce385" table:formula="of:=[.B77]*[.$B$43]" office:value-type="float" office:value="-15.968129889923" calcext:value-type="float">
            <text:p><text:s/>(15.97)</text:p>
          </table:table-cell>
          <table:table-cell table:style-name="ce385" table:formula="of:=[.$C$45]" office:value-type="float" office:value="449.071815261042" calcext:value-type="float">
            <text:p><text:s/>449.07 </text:p>
          </table:table-cell>
          <table:table-cell table:style-name="ce385" table:formula="of:=[.B77]-[.C77]" office:value-type="float" office:value="-1828.09953824647" calcext:value-type="float">
            <text:p><text:s/>(1,828.10)</text:p>
          </table:table-cell>
          <table:table-cell table:style-name="ce427" table:formula="of:=[.D77]*0.3" office:value-type="float" office:value="-4.7904389669769" calcext:value-type="float">
            <text:p><text:s/>-4.79 </text:p>
          </table:table-cell>
          <table:table-cell table:number-columns-repeated="16377"/>
        </table:table-row>
        <table:table-row table:style-name="ro1">
          <table:table-cell table:style-name="ce518" office:value-type="float" office:value="17" calcext:value-type="float">
            <text:p>17</text:p>
          </table:table-cell>
          <table:table-cell table:style-name="ce385" table:formula="of:=[.F77]" office:value-type="float" office:value="-1828.09953824647" calcext:value-type="float">
            <text:p><text:s/>(1,828.10)</text:p>
          </table:table-cell>
          <table:table-cell table:style-name="ce385" table:formula="of:=[.E78]-[.D78]" office:value-type="float" office:value="470.487849472822" calcext:value-type="float">
            <text:p><text:s/>470.49 </text:p>
          </table:table-cell>
          <table:table-cell table:style-name="ce385" table:formula="of:=[.B78]*[.$B$43]" office:value-type="float" office:value="-21.4160342117797" calcext:value-type="float">
            <text:p><text:s/>(21.42)</text:p>
          </table:table-cell>
          <table:table-cell table:style-name="ce385" table:formula="of:=[.$C$45]" office:value-type="float" office:value="449.071815261042" calcext:value-type="float">
            <text:p><text:s/>449.07 </text:p>
          </table:table-cell>
          <table:table-cell table:style-name="ce385" table:formula="of:=[.B78]-[.C78]" office:value-type="float" office:value="-2298.58738771929" calcext:value-type="float">
            <text:p><text:s/>(2,298.59)</text:p>
          </table:table-cell>
          <table:table-cell table:style-name="ce427" table:formula="of:=[.D78]*0.3" office:value-type="float" office:value="-6.42481026353392" calcext:value-type="float">
            <text:p><text:s/>-6.42 </text:p>
          </table:table-cell>
          <table:table-cell table:number-columns-repeated="16377"/>
        </table:table-row>
        <table:table-row table:style-name="ro1">
          <table:table-cell table:style-name="ce518" office:value-type="float" office:value="18" calcext:value-type="float">
            <text:p>18</text:p>
          </table:table-cell>
          <table:table-cell table:style-name="ce385" table:formula="of:=[.F78]" office:value-type="float" office:value="-2298.58738771929" calcext:value-type="float">
            <text:p><text:s/>(2,298.59)</text:p>
          </table:table-cell>
          <table:table-cell table:style-name="ce385" table:formula="of:=[.E79]-[.D79]" office:value-type="float" office:value="475.999575541197" calcext:value-type="float">
            <text:p><text:s/>476.00 </text:p>
          </table:table-cell>
          <table:table-cell table:style-name="ce385" table:formula="of:=[.B79]*[.$B$43]" office:value-type="float" office:value="-26.9277602801543" calcext:value-type="float">
            <text:p><text:s/>(26.93)</text:p>
          </table:table-cell>
          <table:table-cell table:style-name="ce385" table:formula="of:=[.$C$45]" office:value-type="float" office:value="449.071815261042" calcext:value-type="float">
            <text:p><text:s/>449.07 </text:p>
          </table:table-cell>
          <table:table-cell table:style-name="ce385" table:formula="of:=[.B79]-[.C79]" office:value-type="float" office:value="-2774.58696326049" calcext:value-type="float">
            <text:p><text:s/>(2,774.59)</text:p>
          </table:table-cell>
          <table:table-cell table:style-name="ce427" table:formula="of:=[.D79]*0.3" office:value-type="float" office:value="-8.0783280840463" calcext:value-type="float">
            <text:p><text:s/>-8.08 </text:p>
          </table:table-cell>
          <table:table-cell table:number-columns-repeated="16377"/>
        </table:table-row>
        <table:table-row table:style-name="ro1">
          <table:table-cell table:style-name="ce518" office:value-type="float" office:value="19" calcext:value-type="float">
            <text:p>19</text:p>
          </table:table-cell>
          <table:table-cell table:style-name="ce385" table:formula="of:=[.F79]" office:value-type="float" office:value="-2774.58696326049" calcext:value-type="float">
            <text:p><text:s/>(2,774.59)</text:p>
          </table:table-cell>
          <table:table-cell table:style-name="ce385" table:formula="of:=[.E80]-[.D80]" office:value-type="float" office:value="481.575871022547" calcext:value-type="float">
            <text:p><text:s/>481.58 </text:p>
          </table:table-cell>
          <table:table-cell table:style-name="ce385" table:formula="of:=[.B80]*[.$B$43]" office:value-type="float" office:value="-32.5040557615049" calcext:value-type="float">
            <text:p><text:s/>(32.50)</text:p>
          </table:table-cell>
          <table:table-cell table:style-name="ce385" table:formula="of:=[.$C$45]" office:value-type="float" office:value="449.071815261042" calcext:value-type="float">
            <text:p><text:s/>449.07 </text:p>
          </table:table-cell>
          <table:table-cell table:style-name="ce385" table:formula="of:=[.B80]-[.C80]" office:value-type="float" office:value="-3256.16283428304" calcext:value-type="float">
            <text:p><text:s/>(3,256.16)</text:p>
          </table:table-cell>
          <table:table-cell table:style-name="ce427" table:formula="of:=[.D80]*0.3" office:value-type="float" office:value="-9.75121672845148" calcext:value-type="float">
            <text:p><text:s/>-9.75 </text:p>
          </table:table-cell>
          <table:table-cell table:number-columns-repeated="16377"/>
        </table:table-row>
        <table:table-row table:style-name="ro1">
          <table:table-cell table:style-name="ce518" office:value-type="float" office:value="20" calcext:value-type="float">
            <text:p>20</text:p>
          </table:table-cell>
          <table:table-cell table:style-name="ce385" table:formula="of:=[.F80]" office:value-type="float" office:value="-3256.16283428304" calcext:value-type="float">
            <text:p><text:s/>(3,256.16)</text:p>
          </table:table-cell>
          <table:table-cell table:style-name="ce385" table:formula="of:=[.E81]-[.D81]" office:value-type="float" office:value="487.217492342182" calcext:value-type="float">
            <text:p><text:s/>487.22 </text:p>
          </table:table-cell>
          <table:table-cell table:style-name="ce385" table:formula="of:=[.B81]*[.$B$43]" office:value-type="float" office:value="-38.1456770811401" calcext:value-type="float">
            <text:p><text:s/>(38.15)</text:p>
          </table:table-cell>
          <table:table-cell table:style-name="ce385" table:formula="of:=[.$C$45]" office:value-type="float" office:value="449.071815261042" calcext:value-type="float">
            <text:p><text:s/>449.07 </text:p>
          </table:table-cell>
          <table:table-cell table:style-name="ce385" table:formula="of:=[.B81]-[.C81]" office:value-type="float" office:value="-3743.38032662522" calcext:value-type="float">
            <text:p><text:s/>(3,743.38)</text:p>
          </table:table-cell>
          <table:table-cell table:style-name="ce427" table:formula="of:=[.D81]*0.3" office:value-type="float" office:value="-11.443703124342" calcext:value-type="float">
            <text:p><text:s/>-11.44 </text:p>
          </table:table-cell>
          <table:table-cell table:number-columns-repeated="16377"/>
        </table:table-row>
        <table:table-row table:style-name="ro1">
          <table:table-cell table:style-name="ce518" office:value-type="float" office:value="21" calcext:value-type="float">
            <text:p>21</text:p>
          </table:table-cell>
          <table:table-cell table:style-name="ce385" table:formula="of:=[.F81]" office:value-type="float" office:value="-3743.38032662522" calcext:value-type="float">
            <text:p><text:s/>(3,743.38)</text:p>
          </table:table-cell>
          <table:table-cell table:style-name="ce385" table:formula="of:=[.E82]-[.D82]" office:value-type="float" office:value="492.92520478687" calcext:value-type="float">
            <text:p><text:s/>492.93 </text:p>
          </table:table-cell>
          <table:table-cell table:style-name="ce385" table:formula="of:=[.B82]*[.$B$43]" office:value-type="float" office:value="-43.8533895258281" calcext:value-type="float">
            <text:p><text:s/>(43.85)</text:p>
          </table:table-cell>
          <table:table-cell table:style-name="ce385" table:formula="of:=[.$C$45]" office:value-type="float" office:value="449.071815261042" calcext:value-type="float">
            <text:p><text:s/>449.07 </text:p>
          </table:table-cell>
          <table:table-cell table:style-name="ce385" table:formula="of:=[.B82]-[.C82]" office:value-type="float" office:value="-4236.30553141209" calcext:value-type="float">
            <text:p><text:s/>(4,236.31)</text:p>
          </table:table-cell>
          <table:table-cell table:style-name="ce427" table:formula="of:=[.D82]*0.3" office:value-type="float" office:value="-13.1560168577484" calcext:value-type="float">
            <text:p><text:s/>-13.16 </text:p>
          </table:table-cell>
          <table:table-cell table:number-columns-repeated="16377"/>
        </table:table-row>
        <table:table-row table:style-name="ro1">
          <table:table-cell table:style-name="ce518" office:value-type="float" office:value="22" calcext:value-type="float">
            <text:p>22</text:p>
          </table:table-cell>
          <table:table-cell table:style-name="ce385" table:formula="of:=[.F82]" office:value-type="float" office:value="-4236.30553141209" calcext:value-type="float">
            <text:p><text:s/>(4,236.31)</text:p>
          </table:table-cell>
          <table:table-cell table:style-name="ce385" table:formula="of:=[.E83]-[.D83]" office:value-type="float" office:value="498.69978260865" calcext:value-type="float">
            <text:p><text:s/>498.70 </text:p>
          </table:table-cell>
          <table:table-cell table:style-name="ce385" table:formula="of:=[.B83]*[.$B$43]" office:value-type="float" office:value="-49.627967347608" calcext:value-type="float">
            <text:p><text:s/>(49.63)</text:p>
          </table:table-cell>
          <table:table-cell table:style-name="ce385" table:formula="of:=[.$C$45]" office:value-type="float" office:value="449.071815261042" calcext:value-type="float">
            <text:p><text:s/>449.07 </text:p>
          </table:table-cell>
          <table:table-cell table:style-name="ce385" table:formula="of:=[.B83]-[.C83]" office:value-type="float" office:value="-4735.00531402074" calcext:value-type="float">
            <text:p><text:s/>(4,735.01)</text:p>
          </table:table-cell>
          <table:table-cell table:style-name="ce427" table:formula="of:=[.D83]*0.3" office:value-type="float" office:value="-14.8883902042824" calcext:value-type="float">
            <text:p><text:s/>-14.89 </text:p>
          </table:table-cell>
          <table:table-cell table:number-columns-repeated="16377"/>
        </table:table-row>
        <table:table-row table:style-name="ro1">
          <table:table-cell table:style-name="ce518" office:value-type="float" office:value="23" calcext:value-type="float">
            <text:p>23</text:p>
          </table:table-cell>
          <table:table-cell table:style-name="ce385" table:formula="of:=[.F83]" office:value-type="float" office:value="-4735.00531402074" calcext:value-type="float">
            <text:p><text:s/>(4,735.01)</text:p>
          </table:table-cell>
          <table:table-cell table:style-name="ce385" table:formula="of:=[.E84]-[.D84]" office:value-type="float" office:value="504.54200912986" calcext:value-type="float">
            <text:p><text:s/>504.54 </text:p>
          </table:table-cell>
          <table:table-cell table:style-name="ce385" table:formula="of:=[.B84]*[.$B$43]" office:value-type="float" office:value="-55.4701938688172" calcext:value-type="float">
            <text:p><text:s/>(55.47)</text:p>
          </table:table-cell>
          <table:table-cell table:style-name="ce385" table:formula="of:=[.$C$45]" office:value-type="float" office:value="449.071815261042" calcext:value-type="float">
            <text:p><text:s/>449.07 </text:p>
          </table:table-cell>
          <table:table-cell table:style-name="ce385" table:formula="of:=[.B84]-[.C84]" office:value-type="float" office:value="-5239.5473231506" calcext:value-type="float">
            <text:p><text:s/>(5,239.55)</text:p>
          </table:table-cell>
          <table:table-cell table:style-name="ce427" table:formula="of:=[.D84]*0.3" office:value-type="float" office:value="-16.6410581606452" calcext:value-type="float">
            <text:p><text:s/>-16.64 </text:p>
          </table:table-cell>
          <table:table-cell table:number-columns-repeated="16377"/>
        </table:table-row>
        <table:table-row table:style-name="ro1">
          <table:table-cell table:style-name="ce518" office:value-type="float" office:value="24" calcext:value-type="float">
            <text:p>24</text:p>
          </table:table-cell>
          <table:table-cell table:style-name="ce385" table:formula="of:=[.F84]" office:value-type="float" office:value="-5239.5473231506" calcext:value-type="float">
            <text:p><text:s/>(5,239.55)</text:p>
          </table:table-cell>
          <table:table-cell table:style-name="ce385" table:formula="of:=[.E85]-[.D85]" office:value-type="float" office:value="510.452676849392" calcext:value-type="float">
            <text:p><text:s/>510.45 </text:p>
          </table:table-cell>
          <table:table-cell table:style-name="ce385" table:formula="of:=[.B85]*[.$B$43]" office:value-type="float" office:value="-61.3808615883494" calcext:value-type="float">
            <text:p><text:s/>(61.38)</text:p>
          </table:table-cell>
          <table:table-cell table:style-name="ce385" table:formula="of:=[.$C$45]" office:value-type="float" office:value="449.071815261042" calcext:value-type="float">
            <text:p><text:s/>449.07 </text:p>
          </table:table-cell>
          <table:table-cell table:style-name="ce385" table:formula="of:=[.B85]-[.C85]" office:value-type="float" office:value="-5749.99999999999" calcext:value-type="float">
            <text:p><text:s/>(5,750.00)</text:p>
          </table:table-cell>
          <table:table-cell table:style-name="ce427" table:formula="of:=[.D85]*0.3" office:value-type="float" office:value="-18.4142584765048" calcext:value-type="float">
            <text:p><text:s/>-18.41 </text:p>
          </table:table-cell>
          <table:table-cell table:number-columns-repeated="16377"/>
        </table:table-row>
        <table:table-row table:style-name="ro1">
          <table:table-cell table:style-name="ce518" office:value-type="float" office:value="25" calcext:value-type="float">
            <text:p>25</text:p>
          </table:table-cell>
          <table:table-cell table:style-name="ce385" table:formula="of:=[.F85]" office:value-type="float" office:value="-5749.99999999999" calcext:value-type="float">
            <text:p><text:s/>(5,750.00)</text:p>
          </table:table-cell>
          <table:table-cell table:style-name="ce385" table:formula="of:=[.E86]-[.D86]" office:value-type="float" office:value="516.432587550199" calcext:value-type="float">
            <text:p><text:s/>516.43 </text:p>
          </table:table-cell>
          <table:table-cell table:style-name="ce385" table:formula="of:=[.B86]*[.$B$43]" office:value-type="float" office:value="-67.3607722891568" calcext:value-type="float">
            <text:p><text:s/>(67.36)</text:p>
          </table:table-cell>
          <table:table-cell table:style-name="ce385" table:formula="of:=[.$C$45]" office:value-type="float" office:value="449.071815261042" calcext:value-type="float">
            <text:p><text:s/>449.07 </text:p>
          </table:table-cell>
          <table:table-cell table:style-name="ce385" table:formula="of:=[.B86]-[.C86]" office:value-type="float" office:value="-6266.43258755019" calcext:value-type="float">
            <text:p><text:s/>(6,266.43)</text:p>
          </table:table-cell>
          <table:table-cell table:style-name="ce427" table:formula="of:=[.D86]*0.3" office:value-type="float" office:value="-20.208231686747" calcext:value-type="float">
            <text:p><text:s/>-20.21 </text:p>
          </table:table-cell>
          <table:table-cell table:number-columns-repeated="16377"/>
        </table:table-row>
        <table:table-row table:style-name="ro1">
          <table:table-cell table:style-name="ce518" office:value-type="float" office:value="26" calcext:value-type="float">
            <text:p>26</text:p>
          </table:table-cell>
          <table:table-cell table:style-name="ce385" table:formula="of:=[.F86]" office:value-type="float" office:value="-6266.43258755019" calcext:value-type="float">
            <text:p><text:s/>(6,266.43)</text:p>
          </table:table-cell>
          <table:table-cell table:style-name="ce385" table:formula="of:=[.E87]-[.D87]" office:value-type="float" office:value="522.482552408055" calcext:value-type="float">
            <text:p><text:s/>522.48 </text:p>
          </table:table-cell>
          <table:table-cell table:style-name="ce385" table:formula="of:=[.B87]*[.$B$43]" office:value-type="float" office:value="-73.4107371470123" calcext:value-type="float">
            <text:p><text:s/>(73.41)</text:p>
          </table:table-cell>
          <table:table-cell table:style-name="ce385" table:formula="of:=[.$C$45]" office:value-type="float" office:value="449.071815261042" calcext:value-type="float">
            <text:p><text:s/>449.07 </text:p>
          </table:table-cell>
          <table:table-cell table:style-name="ce385" table:formula="of:=[.B87]-[.C87]" office:value-type="float" office:value="-6788.91513995824" calcext:value-type="float">
            <text:p><text:s/>(6,788.92)</text:p>
          </table:table-cell>
          <table:table-cell table:style-name="ce427" table:formula="of:=[.D87]*0.3" office:value-type="float" office:value="-22.0232211441037" calcext:value-type="float">
            <text:p><text:s/>-22.02 </text:p>
          </table:table-cell>
          <table:table-cell table:number-columns-repeated="16377"/>
        </table:table-row>
        <table:table-row table:style-name="ro1">
          <table:table-cell table:style-name="ce518" office:value-type="float" office:value="27" calcext:value-type="float">
            <text:p>27</text:p>
          </table:table-cell>
          <table:table-cell table:style-name="ce385" table:formula="of:=[.F87]" office:value-type="float" office:value="-6788.91513995824" calcext:value-type="float">
            <text:p><text:s/>(6,788.92)</text:p>
          </table:table-cell>
          <table:table-cell table:style-name="ce385" table:formula="of:=[.E88]-[.D88]" office:value-type="float" office:value="528.603392101588" calcext:value-type="float">
            <text:p><text:s/>528.60 </text:p>
          </table:table-cell>
          <table:table-cell table:style-name="ce385" table:formula="of:=[.B88]*[.$B$43]" office:value-type="float" office:value="-79.5315768405456" calcext:value-type="float">
            <text:p><text:s/>(79.53)</text:p>
          </table:table-cell>
          <table:table-cell table:style-name="ce385" table:formula="of:=[.$C$45]" office:value-type="float" office:value="449.071815261042" calcext:value-type="float">
            <text:p><text:s/>449.07 </text:p>
          </table:table-cell>
          <table:table-cell table:style-name="ce385" table:formula="of:=[.B88]-[.C88]" office:value-type="float" office:value="-7317.51853205983" calcext:value-type="float">
            <text:p><text:s/>(7,317.52)</text:p>
          </table:table-cell>
          <table:table-cell table:style-name="ce427" table:formula="of:=[.D88]*0.3" office:value-type="float" office:value="-23.8594730521637" calcext:value-type="float">
            <text:p><text:s/>-23.86 </text:p>
          </table:table-cell>
          <table:table-cell table:number-columns-repeated="16377"/>
        </table:table-row>
        <table:table-row table:style-name="ro1">
          <table:table-cell table:style-name="ce518" office:value-type="float" office:value="28" calcext:value-type="float">
            <text:p>28</text:p>
          </table:table-cell>
          <table:table-cell table:style-name="ce385" table:formula="of:=[.F88]" office:value-type="float" office:value="-7317.51853205983" calcext:value-type="float">
            <text:p><text:s/>(7,317.52)</text:p>
          </table:table-cell>
          <table:table-cell table:style-name="ce385" table:formula="of:=[.E89]-[.D89]" office:value-type="float" office:value="534.795936923611" calcext:value-type="float">
            <text:p><text:s/>534.80 </text:p>
          </table:table-cell>
          <table:table-cell table:style-name="ce385" table:formula="of:=[.B89]*[.$B$43]" office:value-type="float" office:value="-85.7241216625684" calcext:value-type="float">
            <text:p><text:s/>(85.72)</text:p>
          </table:table-cell>
          <table:table-cell table:style-name="ce385" table:formula="of:=[.$C$45]" office:value-type="float" office:value="449.071815261042" calcext:value-type="float">
            <text:p><text:s/>449.07 </text:p>
          </table:table-cell>
          <table:table-cell table:style-name="ce385" table:formula="of:=[.B89]-[.C89]" office:value-type="float" office:value="-7852.31446898344" calcext:value-type="float">
            <text:p><text:s/>(7,852.31)</text:p>
          </table:table-cell>
          <table:table-cell table:style-name="ce427" table:formula="of:=[.D89]*0.3" office:value-type="float" office:value="-25.7172364987705" calcext:value-type="float">
            <text:p><text:s/>-25.72 </text:p>
          </table:table-cell>
          <table:table-cell table:number-columns-repeated="16377"/>
        </table:table-row>
        <table:table-row table:style-name="ro1">
          <table:table-cell table:style-name="ce518" office:value-type="float" office:value="29" calcext:value-type="float">
            <text:p>29</text:p>
          </table:table-cell>
          <table:table-cell table:style-name="ce385" table:formula="of:=[.F89]" office:value-type="float" office:value="-7852.31446898344" calcext:value-type="float">
            <text:p><text:s/>(7,852.31)</text:p>
          </table:table-cell>
          <table:table-cell table:style-name="ce385" table:formula="of:=[.E90]-[.D90]" office:value-type="float" office:value="541.061026893746" calcext:value-type="float">
            <text:p><text:s/>541.06 </text:p>
          </table:table-cell>
          <table:table-cell table:style-name="ce385" table:formula="of:=[.B90]*[.$B$43]" office:value-type="float" office:value="-91.9892116327036" calcext:value-type="float">
            <text:p><text:s/>(91.99)</text:p>
          </table:table-cell>
          <table:table-cell table:style-name="ce385" table:formula="of:=[.$C$45]" office:value-type="float" office:value="449.071815261042" calcext:value-type="float">
            <text:p><text:s/>449.07 </text:p>
          </table:table-cell>
          <table:table-cell table:style-name="ce385" table:formula="of:=[.B90]-[.C90]" office:value-type="float" office:value="-8393.37549587719" calcext:value-type="float">
            <text:p><text:s/>(8,393.38)</text:p>
          </table:table-cell>
          <table:table-cell table:style-name="ce427" table:formula="of:=[.D90]*0.3" office:value-type="float" office:value="-27.5967634898111" calcext:value-type="float">
            <text:p><text:s/>-27.60 </text:p>
          </table:table-cell>
          <table:table-cell table:number-columns-repeated="16377"/>
        </table:table-row>
        <table:table-row table:style-name="ro1">
          <table:table-cell table:style-name="ce518" office:value-type="float" office:value="30" calcext:value-type="float">
            <text:p>30</text:p>
          </table:table-cell>
          <table:table-cell table:style-name="ce385" table:formula="of:=[.F90]" office:value-type="float" office:value="-8393.37549587719" calcext:value-type="float">
            <text:p><text:s/>(8,393.38)</text:p>
          </table:table-cell>
          <table:table-cell table:style-name="ce385" table:formula="of:=[.E91]-[.D91]" office:value-type="float" office:value="547.399511872377" calcext:value-type="float">
            <text:p><text:s/>547.40 </text:p>
          </table:table-cell>
          <table:table-cell table:style-name="ce385" table:formula="of:=[.B91]*[.$B$43]" office:value-type="float" office:value="-98.3276966113344" calcext:value-type="float">
            <text:p><text:s/>(98.33)</text:p>
          </table:table-cell>
          <table:table-cell table:style-name="ce385" table:formula="of:=[.$C$45]" office:value-type="float" office:value="449.071815261042" calcext:value-type="float">
            <text:p><text:s/>449.07 </text:p>
          </table:table-cell>
          <table:table-cell table:style-name="ce385" table:formula="of:=[.B91]-[.C91]" office:value-type="float" office:value="-8940.77500774956" calcext:value-type="float">
            <text:p><text:s/>(8,940.78)</text:p>
          </table:table-cell>
          <table:table-cell table:style-name="ce427" table:formula="of:=[.D91]*0.3" office:value-type="float" office:value="-29.4983089834003" calcext:value-type="float">
            <text:p><text:s/>-29.50 </text:p>
          </table:table-cell>
          <table:table-cell table:number-columns-repeated="16377"/>
        </table:table-row>
        <table:table-row table:style-name="ro1">
          <table:table-cell table:style-name="ce518" office:value-type="float" office:value="31" calcext:value-type="float">
            <text:p>31</text:p>
          </table:table-cell>
          <table:table-cell table:style-name="ce385" table:formula="of:=[.F91]" office:value-type="float" office:value="-8940.77500774956" calcext:value-type="float">
            <text:p><text:s/>(8,940.78)</text:p>
          </table:table-cell>
          <table:table-cell table:style-name="ce385" table:formula="of:=[.E92]-[.D92]" office:value-type="float" office:value="553.81225167593" calcext:value-type="float">
            <text:p><text:s/>553.81 </text:p>
          </table:table-cell>
          <table:table-cell table:style-name="ce385" table:formula="of:=[.B92]*[.$B$43]" office:value-type="float" office:value="-104.740436414888" calcext:value-type="float">
            <text:p><text:s/>(104.74)</text:p>
          </table:table-cell>
          <table:table-cell table:style-name="ce385" table:formula="of:=[.$C$45]" office:value-type="float" office:value="449.071815261042" calcext:value-type="float">
            <text:p><text:s/>449.07 </text:p>
          </table:table-cell>
          <table:table-cell table:style-name="ce385" table:formula="of:=[.B92]-[.C92]" office:value-type="float" office:value="-9494.58725942549" calcext:value-type="float">
            <text:p><text:s/>(9,494.59)</text:p>
          </table:table-cell>
          <table:table-cell table:style-name="ce427" table:formula="of:=[.D92]*0.3" office:value-type="float" office:value="-31.4221309244663" calcext:value-type="float">
            <text:p><text:s/>-31.42 </text:p>
          </table:table-cell>
          <table:table-cell table:number-columns-repeated="16377"/>
        </table:table-row>
        <table:table-row table:style-name="ro1">
          <table:table-cell table:style-name="ce518" office:value-type="float" office:value="32" calcext:value-type="float">
            <text:p>32</text:p>
          </table:table-cell>
          <table:table-cell table:style-name="ce385" table:formula="of:=[.F92]" office:value-type="float" office:value="-9494.58725942549" calcext:value-type="float">
            <text:p><text:s/>(9,494.59)</text:p>
          </table:table-cell>
          <table:table-cell table:style-name="ce385" table:formula="of:=[.E93]-[.D93]" office:value-type="float" office:value="560.30011619351" calcext:value-type="float">
            <text:p><text:s/>560.30 </text:p>
          </table:table-cell>
          <table:table-cell table:style-name="ce385" table:formula="of:=[.B93]*[.$B$43]" office:value-type="float" office:value="-111.228300932468" calcext:value-type="float">
            <text:p><text:s/>(111.23)</text:p>
          </table:table-cell>
          <table:table-cell table:style-name="ce385" table:formula="of:=[.$C$45]" office:value-type="float" office:value="449.071815261042" calcext:value-type="float">
            <text:p><text:s/>449.07 </text:p>
          </table:table-cell>
          <table:table-cell table:style-name="ce385" table:formula="of:=[.B93]-[.C93]" office:value-type="float" office:value="-10054.887375619" calcext:value-type="float">
            <text:p><text:s/>(10,054.89)</text:p>
          </table:table-cell>
          <table:table-cell table:style-name="ce427" table:formula="of:=[.D93]*0.3" office:value-type="float" office:value="-33.3684902797404" calcext:value-type="float">
            <text:p><text:s/>-33.37 </text:p>
          </table:table-cell>
          <table:table-cell table:number-columns-repeated="16377"/>
        </table:table-row>
        <table:table-row table:style-name="ro1">
          <table:table-cell table:style-name="ce518" office:value-type="float" office:value="33" calcext:value-type="float">
            <text:p>33</text:p>
          </table:table-cell>
          <table:table-cell table:style-name="ce385" table:formula="of:=[.F93]" office:value-type="float" office:value="-10054.887375619" calcext:value-type="float">
            <text:p><text:s/>(10,054.89)</text:p>
          </table:table-cell>
          <table:table-cell table:style-name="ce385" table:formula="of:=[.E94]-[.D94]" office:value-type="float" office:value="566.863985504902" calcext:value-type="float">
            <text:p><text:s/>566.86 </text:p>
          </table:table-cell>
          <table:table-cell table:style-name="ce385" table:formula="of:=[.B94]*[.$B$43]" office:value-type="float" office:value="-117.792170243859" calcext:value-type="float">
            <text:p><text:s/>(117.79)</text:p>
          </table:table-cell>
          <table:table-cell table:style-name="ce385" table:formula="of:=[.$C$45]" office:value-type="float" office:value="449.071815261042" calcext:value-type="float">
            <text:p><text:s/>449.07 </text:p>
          </table:table-cell>
          <table:table-cell table:style-name="ce385" table:formula="of:=[.B94]-[.C94]" office:value-type="float" office:value="-10621.7513611239" calcext:value-type="float">
            <text:p><text:s/>(10,621.75)</text:p>
          </table:table-cell>
          <table:table-cell table:style-name="ce427" table:formula="of:=[.D94]*0.3" office:value-type="float" office:value="-35.3376510731578" calcext:value-type="float">
            <text:p><text:s/>-35.34 </text:p>
          </table:table-cell>
          <table:table-cell table:number-columns-repeated="16377"/>
        </table:table-row>
        <table:table-row table:style-name="ro1">
          <table:table-cell table:style-name="ce518" office:value-type="float" office:value="34" calcext:value-type="float">
            <text:p>34</text:p>
          </table:table-cell>
          <table:table-cell table:style-name="ce385" table:formula="of:=[.F94]" office:value-type="float" office:value="-10621.7513611239" calcext:value-type="float">
            <text:p><text:s/>(10,621.75)</text:p>
          </table:table-cell>
          <table:table-cell table:style-name="ce385" table:formula="of:=[.E95]-[.D95]" office:value-type="float" office:value="573.504749999948" calcext:value-type="float">
            <text:p><text:s/>573.50 </text:p>
          </table:table-cell>
          <table:table-cell table:style-name="ce385" table:formula="of:=[.B95]*[.$B$43]" office:value-type="float" office:value="-124.432934738906" calcext:value-type="float">
            <text:p><text:s/>(124.43)</text:p>
          </table:table-cell>
          <table:table-cell table:style-name="ce385" table:formula="of:=[.$C$45]" office:value-type="float" office:value="449.071815261042" calcext:value-type="float">
            <text:p><text:s/>449.07 </text:p>
          </table:table-cell>
          <table:table-cell table:style-name="ce385" table:formula="of:=[.B95]-[.C95]" office:value-type="float" office:value="-11195.2561111239" calcext:value-type="float">
            <text:p><text:s/>(11,195.26)</text:p>
          </table:table-cell>
          <table:table-cell table:style-name="ce427" table:formula="of:=[.D95]*0.3" office:value-type="float" office:value="-37.3298804216718" calcext:value-type="float">
            <text:p><text:s/>-37.33 </text:p>
          </table:table-cell>
          <table:table-cell table:number-columns-repeated="16377"/>
        </table:table-row>
        <table:table-row table:style-name="ro1">
          <table:table-cell table:style-name="ce518" office:value-type="float" office:value="35" calcext:value-type="float">
            <text:p>35</text:p>
          </table:table-cell>
          <table:table-cell table:style-name="ce385" table:formula="of:=[.F95]" office:value-type="float" office:value="-11195.2561111239" calcext:value-type="float">
            <text:p><text:s/>(11,195.26)</text:p>
          </table:table-cell>
          <table:table-cell table:style-name="ce385" table:formula="of:=[.E96]-[.D96]" office:value-type="float" office:value="580.223310499339" calcext:value-type="float">
            <text:p><text:s/>580.22 </text:p>
          </table:table-cell>
          <table:table-cell table:style-name="ce385" table:formula="of:=[.B96]*[.$B$43]" office:value-type="float" office:value="-131.151495238297" calcext:value-type="float">
            <text:p><text:s/>(131.15)</text:p>
          </table:table-cell>
          <table:table-cell table:style-name="ce385" table:formula="of:=[.$C$45]" office:value-type="float" office:value="449.071815261042" calcext:value-type="float">
            <text:p><text:s/>449.07 </text:p>
          </table:table-cell>
          <table:table-cell table:style-name="ce385" table:formula="of:=[.B96]-[.C96]" office:value-type="float" office:value="-11775.4794216232" calcext:value-type="float">
            <text:p><text:s/>(11,775.48)</text:p>
          </table:table-cell>
          <table:table-cell table:style-name="ce427" table:formula="of:=[.D96]*0.3" office:value-type="float" office:value="-39.345448571489" calcext:value-type="float">
            <text:p><text:s/>-39.35 </text:p>
          </table:table-cell>
          <table:table-cell table:number-columns-repeated="16377"/>
        </table:table-row>
        <table:table-row table:style-name="ro1">
          <table:table-cell table:style-name="ce518" office:value-type="float" office:value="36" calcext:value-type="float">
            <text:p>36</text:p>
          </table:table-cell>
          <table:table-cell table:style-name="ce385" table:formula="of:=[.F96]" office:value-type="float" office:value="-11775.4794216232" calcext:value-type="float">
            <text:p><text:s/>(11,775.48)</text:p>
          </table:table-cell>
          <table:table-cell table:style-name="ce385" table:formula="of:=[.E97]-[.D97]" office:value-type="float" office:value="587.020578376801" calcext:value-type="float">
            <text:p><text:s/>587.02 </text:p>
          </table:table-cell>
          <table:table-cell table:style-name="ce385" table:formula="of:=[.B97]*[.$B$43]" office:value-type="float" office:value="-137.948763115759" calcext:value-type="float">
            <text:p><text:s/>(137.95)</text:p>
          </table:table-cell>
          <table:table-cell table:style-name="ce385" table:formula="of:=[.$C$45]" office:value-type="float" office:value="449.071815261042" calcext:value-type="float">
            <text:p><text:s/>449.07 </text:p>
          </table:table-cell>
          <table:table-cell table:style-name="ce385" table:formula="of:=[.B97]-[.C97]" office:value-type="float" office:value="-12362.5" calcext:value-type="float">
            <text:p><text:s/>(12,362.50)</text:p>
          </table:table-cell>
          <table:table-cell table:style-name="ce427" table:formula="of:=[.D97]*0.3" office:value-type="float" office:value="-41.3846289347277" calcext:value-type="float">
            <text:p><text:s/>-41.38 </text:p>
          </table:table-cell>
          <table:table-cell table:number-columns-repeated="16377"/>
        </table:table-row>
        <table:table-row table:style-name="ro1">
          <table:table-cell table:style-name="ce339"/>
          <table:table-cell table:style-name="ce385" table:number-columns-repeated="5"/>
          <table:table-cell table:number-columns-repeated="16378"/>
        </table:table-row>
        <table:table-row table:style-name="ro1">
          <table:table-cell table:style-name="ce339"/>
          <table:table-cell table:style-name="ce385" table:number-columns-repeated="6"/>
          <table:table-cell table:number-columns-repeated="16377"/>
        </table:table-row>
        <table:table-row table:style-name="ro1">
          <table:table-cell table:number-columns-repeated="16384"/>
        </table:table-row>
        <table:table-row table:style-name="ro1">
          <table:table-cell table:number-columns-repeated="5"/>
          <table:table-cell table:style-name="ce568" table:number-columns-repeated="2"/>
          <table:table-cell table:number-columns-repeated="16377"/>
        </table:table-row>
        <table:table-row table:style-name="ro1" table:number-rows-repeated="2">
          <table:table-cell table:number-columns-repeated="5"/>
          <table:table-cell table:style-name="ce345" table:number-columns-repeated="2"/>
          <table:table-cell table:number-columns-repeated="16377"/>
        </table:table-row>
        <table:table-row table:style-name="ro1">
          <table:table-cell table:number-columns-repeated="5"/>
          <table:table-cell table:style-name="ce384"/>
          <table:table-cell table:style-name="ce345"/>
          <table:table-cell table:number-columns-repeated="16377"/>
        </table:table-row>
        <table:table-row table:style-name="ro1">
          <table:table-cell table:number-columns-repeated="4"/>
          <table:table-cell table:style-name="ce566"/>
          <table:table-cell table:style-name="ce569" table:number-columns-repeated="2"/>
          <table:table-cell table:number-columns-repeated="16377"/>
        </table:table-row>
        <table:table-row table:style-name="ro1">
          <table:table-cell table:number-columns-repeated="4"/>
          <table:table-cell table:style-name="ce566"/>
          <table:table-cell table:style-name="ce345" table:number-columns-repeated="2"/>
          <table:table-cell table:number-columns-repeated="16377"/>
        </table:table-row>
        <table:table-row table:style-name="ro1">
          <table:table-cell table:number-columns-repeated="5"/>
          <table:table-cell table:style-name="ce345" table:number-columns-repeated="2"/>
          <table:table-cell table:number-columns-repeated="16377"/>
        </table:table-row>
        <table:table-row table:style-name="ro1" table:number-rows-repeated="114">
          <table:table-cell table:style-name="ce339"/>
          <table:table-cell table:style-name="ce385" table:number-columns-repeated="6"/>
          <table:table-cell table:number-columns-repeated="16377"/>
        </table:table-row>
        <table:table-row table:style-name="ro1" table:number-rows-repeated="79">
          <table:table-cell table:style-name="ce339" table:number-columns-repeated="6"/>
          <table:table-cell table:number-columns-repeated="16378"/>
        </table:table-row>
        <table:table-row table:style-name="ro1" table:number-rows-repeated="1048275">
          <table:table-cell table:number-columns-repeated="16384"/>
        </table:table-row>
        <table:table-row table:style-name="ro1">
          <table:table-cell table:number-columns-repeated="16384"/>
        </table:table-row>
        <table:named-expressions>
          <table:named-range table:name="_xlnm.Print_Area" table:base-cell-address="$POBLACION.$A$1" table:cell-range-address="$FINANCIAMIENT.$A$1:.$E$55" table:range-usable-as="print-range"/>
        </table:named-expressions>
      </table:table>
      <table:table table:name="COSTO PROD Y OPER" table:style-name="ta15" table:print-ranges="'COSTO PROD Y OPER'.A33:'COSTO PROD Y OPER'.N94">
        <table:table-column table:style-name="co88" table:default-cell-style-name="ce2"/>
        <table:table-column table:style-name="co89" table:default-cell-style-name="ce2"/>
        <table:table-column table:style-name="co2" table:default-cell-style-name="ce2"/>
        <table:table-column table:style-name="co50" table:default-cell-style-name="ce2"/>
        <table:table-column table:style-name="co90" table:default-cell-style-name="ce2"/>
        <table:table-column table:style-name="co30" table:default-cell-style-name="ce2"/>
        <table:table-column table:style-name="co91" table:default-cell-style-name="ce2"/>
        <table:table-column table:style-name="co92" table:default-cell-style-name="ce2"/>
        <table:table-column table:style-name="co91" table:default-cell-style-name="ce2"/>
        <table:table-column table:style-name="co63" table:number-columns-repeated="4" table:default-cell-style-name="ce2"/>
        <table:table-column table:style-name="co1" table:number-columns-repeated="16371" table:default-cell-style-name="ce2"/>
        <table:table-row table:style-name="ro1">
          <table:table-cell table:number-columns-repeated="16384"/>
        </table:table-row>
        <table:table-row table:style-name="ro1">
          <table:table-cell table:style-name="ce570" office:value-type="string" calcext:value-type="string" table:number-columns-spanned="5" table:number-rows-spanned="1">
            <text:p>SERVICIOS BASICOS</text:p>
          </table:table-cell>
          <table:covered-table-cell table:number-columns-repeated="4" table:style-name="ce570"/>
          <table:table-cell table:style-name="ce325" table:number-columns-repeated="2"/>
          <table:table-cell table:number-columns-repeated="16377"/>
        </table:table-row>
        <table:table-row table:style-name="ro1">
          <table:table-cell table:style-name="ce292" office:value-type="string" calcext:value-type="string">
            <text:p>Descripcion</text:p>
          </table:table-cell>
          <table:table-cell table:style-name="ce292" office:value-type="string" calcext:value-type="string">
            <text:p>U.Med</text:p>
          </table:table-cell>
          <table:table-cell table:style-name="ce292" office:value-type="string" calcext:value-type="string">
            <text:p>Cantidad</text:p>
          </table:table-cell>
          <table:table-cell table:style-name="ce292" office:value-type="string" calcext:value-type="string">
            <text:p>P.Unit</text:p>
          </table:table-cell>
          <table:table-cell table:style-name="ce292" office:value-type="string" calcext:value-type="string">
            <text:p>Costo total</text:p>
          </table:table-cell>
          <table:table-cell table:style-name="ce327" table:number-columns-repeated="2"/>
          <table:table-cell table:number-columns-repeated="16377"/>
        </table:table-row>
        <table:table-row table:style-name="ro1">
          <table:table-cell table:style-name="ce296" office:value-type="string" calcext:value-type="string">
            <text:p>Luz</text:p>
          </table:table-cell>
          <table:table-cell table:style-name="ce296" office:value-type="string" calcext:value-type="string">
            <text:p>mes</text:p>
          </table:table-cell>
          <table:table-cell table:style-name="ce296" office:value-type="float" office:value="12" calcext:value-type="float">
            <text:p>12</text:p>
          </table:table-cell>
          <table:table-cell table:style-name="ce317" office:value-type="float" office:value="0" calcext:value-type="float">
            <text:p><text:s/>- <text:s text:c="2"/></text:p>
          </table:table-cell>
          <table:table-cell table:style-name="ce317" table:formula="of:=[.C4]*[.D4]" office:value-type="float" office:value="0" calcext:value-type="float">
            <text:p><text:s/>- <text:s text:c="2"/></text:p>
          </table:table-cell>
          <table:table-cell table:style-name="ce333" table:number-columns-repeated="2"/>
          <table:table-cell table:number-columns-repeated="16377"/>
        </table:table-row>
        <table:table-row table:style-name="ro1">
          <table:table-cell table:style-name="ce296" office:value-type="string" calcext:value-type="string">
            <text:p>Agua</text:p>
          </table:table-cell>
          <table:table-cell table:style-name="ce296" office:value-type="string" calcext:value-type="string">
            <text:p>mes</text:p>
          </table:table-cell>
          <table:table-cell table:style-name="ce296" office:value-type="float" office:value="12" calcext:value-type="float">
            <text:p>12</text:p>
          </table:table-cell>
          <table:table-cell table:style-name="ce317" office:value-type="float" office:value="2" calcext:value-type="float">
            <text:p><text:s/>2.00 </text:p>
          </table:table-cell>
          <table:table-cell table:style-name="ce317" table:formula="of:=[.C5]*[.D5]" office:value-type="float" office:value="24" calcext:value-type="float">
            <text:p><text:s/>24.00 </text:p>
          </table:table-cell>
          <table:table-cell table:style-name="ce333" table:number-columns-repeated="2"/>
          <table:table-cell table:number-columns-repeated="16377"/>
        </table:table-row>
        <table:table-row table:style-name="ro1">
          <table:table-cell table:style-name="ce296" office:value-type="string" calcext:value-type="string">
            <text:p>Telefonia</text:p>
          </table:table-cell>
          <table:table-cell table:style-name="ce296" office:value-type="string" calcext:value-type="string">
            <text:p>mes</text:p>
          </table:table-cell>
          <table:table-cell table:style-name="ce296" office:value-type="float" office:value="12" calcext:value-type="float">
            <text:p>12</text:p>
          </table:table-cell>
          <table:table-cell table:style-name="ce317" office:value-type="float" office:value="30" calcext:value-type="float">
            <text:p><text:s/>30.00 </text:p>
          </table:table-cell>
          <table:table-cell table:style-name="ce317" table:formula="of:=[.C6]*[.D6]" office:value-type="float" office:value="360" calcext:value-type="float">
            <text:p><text:s/>360.00 </text:p>
          </table:table-cell>
          <table:table-cell table:style-name="ce333" table:number-columns-repeated="2"/>
          <table:table-cell table:number-columns-repeated="16377"/>
        </table:table-row>
        <table:table-row table:style-name="ro1">
          <table:table-cell table:style-name="ce571" office:value-type="string" calcext:value-type="string">
            <text:p>Internet</text:p>
          </table:table-cell>
          <table:table-cell table:style-name="ce296" office:value-type="string" calcext:value-type="string">
            <text:p>mes</text:p>
          </table:table-cell>
          <table:table-cell table:style-name="ce296" office:value-type="float" office:value="12" calcext:value-type="float">
            <text:p>12</text:p>
          </table:table-cell>
          <table:table-cell table:style-name="ce618" office:value-type="float" office:value="20" calcext:value-type="float">
            <text:p><text:s/>20.00 </text:p>
          </table:table-cell>
          <table:table-cell table:style-name="ce317" table:formula="of:=[.C7]*[.D7]" office:value-type="float" office:value="240" calcext:value-type="float">
            <text:p><text:s/>240.00 </text:p>
          </table:table-cell>
          <table:table-cell table:style-name="ce333" table:number-columns-repeated="2"/>
          <table:table-cell table:number-columns-repeated="16377"/>
        </table:table-row>
        <table:table-row table:style-name="ro1">
          <table:table-cell table:style-name="ce572" office:value-type="string" calcext:value-type="string">
            <text:p>TOTAL</text:p>
          </table:table-cell>
          <table:table-cell table:style-name="ce595" table:number-columns-repeated="3"/>
          <table:table-cell table:style-name="ce621" table:formula="of:=SUM([.E4:.E7])" office:value-type="float" office:value="624" calcext:value-type="float">
            <text:p><text:s/>624.00 </text:p>
          </table:table-cell>
          <table:table-cell table:style-name="ce625" table:number-columns-repeated="2"/>
          <table:table-cell table:number-columns-repeated="16377"/>
        </table:table-row>
        <table:table-row table:style-name="ro1">
          <table:table-cell table:style-name="ce290" table:number-columns-repeated="7"/>
          <table:table-cell table:number-columns-repeated="16377"/>
        </table:table-row>
        <table:table-row table:style-name="ro1">
          <table:table-cell table:style-name="ce573" office:value-type="string" calcext:value-type="string" table:number-columns-spanned="5" table:number-rows-spanned="1">
            <text:p>UTILES DE OFICINA Y LIMPIEZA</text:p>
          </table:table-cell>
          <table:covered-table-cell table:number-columns-repeated="4" table:style-name="ce573"/>
          <table:table-cell table:style-name="ce626" table:number-columns-repeated="2"/>
          <table:table-cell table:number-columns-repeated="16377"/>
        </table:table-row>
        <table:table-row table:style-name="ro1">
          <table:table-cell table:style-name="ce292" office:value-type="string" calcext:value-type="string">
            <text:p>Descripcion</text:p>
          </table:table-cell>
          <table:table-cell table:style-name="ce292" office:value-type="string" calcext:value-type="string">
            <text:p>U.Med</text:p>
          </table:table-cell>
          <table:table-cell table:style-name="ce292" office:value-type="string" calcext:value-type="string">
            <text:p>Cantidad</text:p>
          </table:table-cell>
          <table:table-cell table:style-name="ce292" office:value-type="string" calcext:value-type="string">
            <text:p>P.Unit</text:p>
          </table:table-cell>
          <table:table-cell table:style-name="ce292" office:value-type="string" calcext:value-type="string">
            <text:p>Costo total</text:p>
          </table:table-cell>
          <table:table-cell table:style-name="ce327" table:number-columns-repeated="2"/>
          <table:table-cell table:number-columns-repeated="16377"/>
        </table:table-row>
        <table:table-row table:style-name="ro1">
          <table:table-cell table:style-name="ce574" office:value-type="string" calcext:value-type="string">
            <text:p>Utiles de Oficina</text:p>
          </table:table-cell>
          <table:table-cell table:style-name="ce296" office:value-type="string" calcext:value-type="string">
            <text:p>Glob</text:p>
          </table:table-cell>
          <table:table-cell table:style-name="ce296" office:value-type="float" office:value="1" calcext:value-type="float">
            <text:p>1</text:p>
          </table:table-cell>
          <table:table-cell table:style-name="ce317" office:value-type="float" office:value="10" calcext:value-type="float">
            <text:p><text:s/>10.00 </text:p>
          </table:table-cell>
          <table:table-cell table:style-name="ce317" table:formula="of:=[.D12]*12" office:value-type="float" office:value="120" calcext:value-type="float">
            <text:p><text:s/>120.00 </text:p>
          </table:table-cell>
          <table:table-cell table:style-name="ce627" table:number-columns-repeated="2"/>
          <table:table-cell table:number-columns-repeated="16377"/>
        </table:table-row>
        <table:table-row table:style-name="ro1">
          <table:table-cell table:style-name="ce296" office:value-type="string" calcext:value-type="string">
            <text:p>Articulos de Limpieza</text:p>
          </table:table-cell>
          <table:table-cell table:style-name="ce296" office:value-type="string" calcext:value-type="string">
            <text:p>Glob</text:p>
          </table:table-cell>
          <table:table-cell table:style-name="ce296" office:value-type="float" office:value="1" calcext:value-type="float">
            <text:p>1</text:p>
          </table:table-cell>
          <table:table-cell table:style-name="ce317" office:value-type="float" office:value="15" calcext:value-type="float">
            <text:p><text:s/>15.00 </text:p>
          </table:table-cell>
          <table:table-cell table:style-name="ce317" table:formula="of:=[.D13]*12" office:value-type="float" office:value="180" calcext:value-type="float">
            <text:p><text:s/>180.00 </text:p>
          </table:table-cell>
          <table:table-cell table:style-name="ce333" table:number-columns-repeated="2"/>
          <table:table-cell table:number-columns-repeated="16377"/>
        </table:table-row>
        <table:table-row table:style-name="ro1">
          <table:table-cell table:style-name="ce572" office:value-type="string" calcext:value-type="string">
            <text:p>TOTAL</text:p>
          </table:table-cell>
          <table:table-cell table:style-name="ce595"/>
          <table:table-cell table:style-name="ce610" table:number-columns-repeated="2"/>
          <table:table-cell table:style-name="ce621" table:formula="of:=SUM([.E12:.E13])" office:value-type="float" office:value="300" calcext:value-type="float">
            <text:p><text:s/>300.00 </text:p>
          </table:table-cell>
          <table:table-cell table:style-name="ce622" table:number-columns-repeated="2"/>
          <table:table-cell table:number-columns-repeated="16377"/>
        </table:table-row>
        <table:table-row table:style-name="ro1">
          <table:table-cell table:style-name="ce287" table:number-columns-repeated="7"/>
          <table:table-cell table:number-columns-repeated="16377"/>
        </table:table-row>
        <table:table-row table:style-name="ro1">
          <table:table-cell table:style-name="ce573" office:value-type="string" calcext:value-type="string" table:number-columns-spanned="5" table:number-rows-spanned="1">
            <text:p>EMPAQUE Y EMBALAJE</text:p>
          </table:table-cell>
          <table:covered-table-cell table:number-columns-repeated="4" table:style-name="ce573"/>
          <table:table-cell table:style-name="ce626" table:number-columns-repeated="2"/>
          <table:table-cell table:number-columns-repeated="16377"/>
        </table:table-row>
        <table:table-row table:style-name="ro1">
          <table:table-cell table:style-name="ce292" office:value-type="string" calcext:value-type="string">
            <text:p>Descripcion</text:p>
          </table:table-cell>
          <table:table-cell table:style-name="ce292" office:value-type="string" calcext:value-type="string">
            <text:p>U.Med</text:p>
          </table:table-cell>
          <table:table-cell table:style-name="ce292" office:value-type="string" calcext:value-type="string">
            <text:p>Cantidad</text:p>
          </table:table-cell>
          <table:table-cell table:style-name="ce292" office:value-type="string" calcext:value-type="string">
            <text:p>P.Unit</text:p>
          </table:table-cell>
          <table:table-cell table:style-name="ce292" office:value-type="string" calcext:value-type="string">
            <text:p>Costo total</text:p>
          </table:table-cell>
          <table:table-cell table:style-name="ce327" table:number-columns-repeated="2"/>
          <table:table-cell table:number-columns-repeated="16377"/>
        </table:table-row>
        <table:table-row table:style-name="ro1">
          <table:table-cell table:style-name="ce574" office:value-type="string" calcext:value-type="string">
            <text:p>Empaques de 1 unidad</text:p>
          </table:table-cell>
          <table:table-cell table:style-name="ce296" office:value-type="string" calcext:value-type="string">
            <text:p>unidad</text:p>
          </table:table-cell>
          <table:table-cell table:style-name="ce611" table:formula="of:=[$INGRESOS.B9]" office:value-type="float" office:value="3185.70442141921" calcext:value-type="float">
            <text:p>3186</text:p>
          </table:table-cell>
          <table:table-cell table:style-name="ce317" office:value-type="float" office:value="0.1" calcext:value-type="float">
            <text:p><text:s/>0.10 </text:p>
          </table:table-cell>
          <table:table-cell table:style-name="ce317" table:formula="of:=[.C18]*[.D18]" office:value-type="float" office:value="318.570442141921" calcext:value-type="float">
            <text:p><text:s/>318.57 </text:p>
          </table:table-cell>
          <table:table-cell table:style-name="ce627" table:number-columns-repeated="2"/>
          <table:table-cell table:number-columns-repeated="16377"/>
        </table:table-row>
        <table:table-row table:style-name="ro1">
          <table:table-cell table:style-name="ce296" office:value-type="string" calcext:value-type="string">
            <text:p>Embalaje (caja de 12 unidades)</text:p>
          </table:table-cell>
          <table:table-cell table:style-name="ce296" office:value-type="string" calcext:value-type="string">
            <text:p>Caja </text:p>
          </table:table-cell>
          <table:table-cell table:style-name="ce611" office:value-type="float" office:value="0" calcext:value-type="float">
            <text:p>0</text:p>
          </table:table-cell>
          <table:table-cell table:style-name="ce317" office:value-type="float" office:value="0.5" calcext:value-type="float">
            <text:p><text:s/>0.50 </text:p>
          </table:table-cell>
          <table:table-cell table:style-name="ce317" table:formula="of:=[.C19]*[.D19]" office:value-type="float" office:value="0" calcext:value-type="float">
            <text:p><text:s/>- <text:s text:c="2"/></text:p>
          </table:table-cell>
          <table:table-cell table:style-name="ce333" table:number-columns-repeated="2"/>
          <table:table-cell table:number-columns-repeated="16377"/>
        </table:table-row>
        <table:table-row table:style-name="ro1">
          <table:table-cell table:style-name="ce572" office:value-type="string" calcext:value-type="string">
            <text:p>TOTAL</text:p>
          </table:table-cell>
          <table:table-cell table:style-name="ce595" table:number-columns-repeated="3"/>
          <table:table-cell table:style-name="ce621" table:formula="of:=SUM([.E18:.E19])" office:value-type="float" office:value="318.570442141921" calcext:value-type="float">
            <text:p><text:s/>318.57 </text:p>
          </table:table-cell>
          <table:table-cell table:style-name="ce622" table:number-columns-repeated="2"/>
          <table:table-cell table:number-columns-repeated="16377"/>
        </table:table-row>
        <table:table-row table:style-name="ro1">
          <table:table-cell table:style-name="ce575"/>
          <table:table-cell table:style-name="ce326" table:number-columns-repeated="3"/>
          <table:table-cell table:style-name="ce622" table:number-columns-repeated="3"/>
          <table:table-cell table:number-columns-repeated="16377"/>
        </table:table-row>
        <table:table-row table:style-name="ro1">
          <table:table-cell table:style-name="ce576" office:value-type="string" calcext:value-type="string" table:number-columns-spanned="5" table:number-rows-spanned="1">
            <text:p>MANTENIMIENTO Y REPARACIONES</text:p>
          </table:table-cell>
          <table:covered-table-cell table:number-columns-repeated="3" table:style-name="ce596"/>
          <table:covered-table-cell table:style-name="ce623"/>
          <table:table-cell table:style-name="ce626" table:number-columns-repeated="2"/>
          <table:table-cell table:number-columns-repeated="16377"/>
        </table:table-row>
        <table:table-row table:style-name="ro1">
          <table:table-cell table:style-name="ce577" office:value-type="string" calcext:value-type="string">
            <text:p>Descripcion</text:p>
          </table:table-cell>
          <table:table-cell table:style-name="ce295" office:value-type="string" calcext:value-type="string">
            <text:p>U.Med</text:p>
          </table:table-cell>
          <table:table-cell table:style-name="ce295" office:value-type="string" calcext:value-type="string">
            <text:p>Cantidad</text:p>
          </table:table-cell>
          <table:table-cell table:style-name="ce295" office:value-type="string" calcext:value-type="string">
            <text:p>P.Unit</text:p>
          </table:table-cell>
          <table:table-cell table:style-name="ce621" office:value-type="string" office:string-value="Costo total" calcext:value-type="string">
            <text:p><text:s/>Costo total </text:p>
          </table:table-cell>
          <table:table-cell table:style-name="ce622" table:number-columns-repeated="2"/>
          <table:table-cell table:number-columns-repeated="16377"/>
        </table:table-row>
        <table:table-row table:style-name="ro1">
          <table:table-cell table:style-name="ce574" office:value-type="string" calcext:value-type="string">
            <text:p>Combustible</text:p>
          </table:table-cell>
          <table:table-cell table:style-name="ce296" office:value-type="string" calcext:value-type="string">
            <text:p>Meses</text:p>
          </table:table-cell>
          <table:table-cell table:style-name="ce296" office:value-type="float" office:value="12" calcext:value-type="float">
            <text:p>12</text:p>
          </table:table-cell>
          <table:table-cell table:style-name="ce619" office:value-type="float" office:value="0" calcext:value-type="float">
            <text:p>0.00</text:p>
          </table:table-cell>
          <table:table-cell table:style-name="ce624" table:formula="of:=[.C24]*[.D24]" office:value-type="float" office:value="0" calcext:value-type="float">
            <text:p><text:s/>- <text:s text:c="2"/></text:p>
          </table:table-cell>
          <table:table-cell table:style-name="ce628" table:number-columns-repeated="2"/>
          <table:table-cell table:number-columns-repeated="16377"/>
        </table:table-row>
        <table:table-row table:style-name="ro1">
          <table:table-cell table:style-name="ce574" office:value-type="string" calcext:value-type="string">
            <text:p>Mantenimiento de vehiculo, repuestos, etc.</text:p>
          </table:table-cell>
          <table:table-cell table:style-name="ce296" office:value-type="string" calcext:value-type="string">
            <text:p>Meses</text:p>
          </table:table-cell>
          <table:table-cell table:style-name="ce296" office:value-type="float" office:value="12" calcext:value-type="float">
            <text:p>12</text:p>
          </table:table-cell>
          <table:table-cell table:style-name="ce619" office:value-type="float" office:value="0" calcext:value-type="float">
            <text:p>0.00</text:p>
          </table:table-cell>
          <table:table-cell table:style-name="ce624" table:formula="of:=[.C25]*[.D25]" office:value-type="float" office:value="0" calcext:value-type="float">
            <text:p><text:s/>- <text:s text:c="2"/></text:p>
          </table:table-cell>
          <table:table-cell table:style-name="ce628" table:number-columns-repeated="2"/>
          <table:table-cell table:number-columns-repeated="16377"/>
        </table:table-row>
        <table:table-row table:style-name="ro1">
          <table:table-cell table:style-name="ce574" office:value-type="string" calcext:value-type="string">
            <text:p>Mantenimiento de Maquinaria y Equipos</text:p>
          </table:table-cell>
          <table:table-cell table:style-name="ce296" office:value-type="string" calcext:value-type="string">
            <text:p>Meses</text:p>
          </table:table-cell>
          <table:table-cell table:style-name="ce296" office:value-type="float" office:value="12" calcext:value-type="float">
            <text:p>12</text:p>
          </table:table-cell>
          <table:table-cell table:style-name="ce619" office:value-type="float" office:value="50" calcext:value-type="float">
            <text:p>50.00</text:p>
          </table:table-cell>
          <table:table-cell table:style-name="ce624" table:formula="of:=[.C26]*[.D26]" office:value-type="float" office:value="600" calcext:value-type="float">
            <text:p><text:s/>600.00 </text:p>
          </table:table-cell>
          <table:table-cell table:style-name="ce628" table:number-columns-repeated="2"/>
          <table:table-cell table:number-columns-repeated="16377"/>
        </table:table-row>
        <table:table-row table:style-name="ro1">
          <table:table-cell table:style-name="ce577" office:value-type="string" calcext:value-type="string">
            <text:p>TOTAL</text:p>
          </table:table-cell>
          <table:table-cell table:style-name="ce295" table:number-columns-repeated="3"/>
          <table:table-cell table:style-name="ce621" table:formula="of:=SUM([.E24:.E26])" office:value-type="float" office:value="600" calcext:value-type="float">
            <text:p><text:s/>600.00 </text:p>
          </table:table-cell>
          <table:table-cell table:style-name="ce625" table:number-columns-repeated="2"/>
          <table:table-cell table:number-columns-repeated="16377"/>
        </table:table-row>
        <table:table-row table:style-name="ro1">
          <table:table-cell table:style-name="ce573" office:value-type="string" calcext:value-type="string" table:number-columns-spanned="5" table:number-rows-spanned="1">
            <text:p>FLETE TERRESTRE</text:p>
          </table:table-cell>
          <table:covered-table-cell table:number-columns-repeated="4" table:style-name="ce573"/>
          <table:table-cell table:style-name="ce626" table:number-columns-repeated="2"/>
          <table:table-cell table:number-columns-repeated="16377"/>
        </table:table-row>
        <table:table-row table:style-name="ro1">
          <table:table-cell table:style-name="ce292" office:value-type="string" calcext:value-type="string">
            <text:p>Descripcion</text:p>
          </table:table-cell>
          <table:table-cell table:style-name="ce292" office:value-type="string" calcext:value-type="string">
            <text:p>U.Med</text:p>
          </table:table-cell>
          <table:table-cell table:style-name="ce292" office:value-type="string" calcext:value-type="string">
            <text:p>Cantidad</text:p>
          </table:table-cell>
          <table:table-cell table:style-name="ce292" office:value-type="string" calcext:value-type="string">
            <text:p>P.Unit</text:p>
          </table:table-cell>
          <table:table-cell table:style-name="ce292" office:value-type="string" calcext:value-type="string">
            <text:p>Costo total</text:p>
          </table:table-cell>
          <table:table-cell table:style-name="ce327" table:number-columns-repeated="2"/>
          <table:table-cell table:number-columns-repeated="16377"/>
        </table:table-row>
        <table:table-row table:style-name="ro1">
          <table:table-cell table:style-name="ce574" office:value-type="string" calcext:value-type="string">
            <text:p>Flete Huancasancos - Ayacucho</text:p>
          </table:table-cell>
          <table:table-cell table:style-name="ce296" office:value-type="string" calcext:value-type="string">
            <text:p>Tm</text:p>
          </table:table-cell>
          <table:table-cell table:style-name="ce58" office:value-type="float" office:value="0.0095" calcext:value-type="float">
            <text:p>0.0095</text:p>
          </table:table-cell>
          <table:table-cell table:style-name="ce312" office:value-type="float" office:value="400" calcext:value-type="float">
            <text:p>400.00</text:p>
          </table:table-cell>
          <table:table-cell table:style-name="ce317" table:formula="of:=[.C30]*[.D30]*365" office:value-type="float" office:value="1387" calcext:value-type="float">
            <text:p><text:s/>1,387.00 </text:p>
          </table:table-cell>
          <table:table-cell table:style-name="ce629" table:number-columns-repeated="2"/>
          <table:table-cell table:number-columns-repeated="16377"/>
        </table:table-row>
        <table:table-row table:style-name="ro1">
          <table:table-cell table:style-name="ce572" office:value-type="string" calcext:value-type="string">
            <text:p>TOTAL</text:p>
          </table:table-cell>
          <table:table-cell table:style-name="ce595" table:number-columns-repeated="3"/>
          <table:table-cell table:style-name="ce621" table:formula="of:=SUM([.E30:.E30])" office:value-type="float" office:value="1387" calcext:value-type="float">
            <text:p><text:s/>1,387.00 </text:p>
          </table:table-cell>
          <table:table-cell table:style-name="ce630" table:number-columns-repeated="2"/>
          <table:table-cell table:number-columns-repeated="16377"/>
        </table:table-row>
        <table:table-row table:style-name="ro1" table:number-rows-repeated="2">
          <table:table-cell table:number-columns-repeated="16384"/>
        </table:table-row>
        <table:table-row table:style-name="ro1">
          <table:table-cell table:style-name="ce578" office:value-type="string" calcext:value-type="string" table:number-columns-spanned="5" table:number-rows-spanned="1">
            <text:p>I. COSTOS DE PRODUCCION</text:p>
          </table:table-cell>
          <table:covered-table-cell table:number-columns-repeated="4" table:style-name="ce597"/>
          <table:table-cell table:style-name="ce631" table:number-columns-repeated="2"/>
          <table:table-cell table:style-name="ce275"/>
          <table:table-cell table:number-columns-repeated="16376"/>
        </table:table-row>
        <table:table-row table:style-name="ro1">
          <table:table-cell table:style-name="ce241"/>
          <table:table-cell table:number-columns-repeated="4"/>
          <table:table-cell table:style-name="ce275" table:number-columns-repeated="3"/>
          <table:table-cell table:number-columns-repeated="16376"/>
        </table:table-row>
        <table:table-row table:style-name="ro1">
          <table:table-cell table:style-name="ce241" office:value-type="string" calcext:value-type="string">
            <text:p>I.1 COSTOS DIRECTOS</text:p>
          </table:table-cell>
          <table:table-cell table:number-columns-repeated="4"/>
          <table:table-cell table:style-name="ce275" table:number-columns-repeated="3"/>
          <table:table-cell table:number-columns-repeated="16376"/>
        </table:table-row>
        <table:table-row table:style-name="ro1">
          <table:table-cell table:style-name="ce241" office:value-type="string" calcext:value-type="string">
            <text:p>I.1.1 MATERIALES DIRECTOS</text:p>
          </table:table-cell>
          <table:table-cell table:number-columns-repeated="4"/>
          <table:table-cell table:style-name="ce275" table:number-columns-repeated="3"/>
          <table:table-cell table:number-columns-repeated="16376"/>
        </table:table-row>
        <table:table-row table:style-name="ro36">
          <table:table-cell table:style-name="ce579" office:value-type="string" calcext:value-type="string">
            <text:p>CONCEPTO</text:p>
          </table:table-cell>
          <table:table-cell table:style-name="ce598" office:value-type="string" calcext:value-type="string">
            <text:p>UNIDAD</text:p>
          </table:table-cell>
          <table:table-cell table:style-name="ce606" office:value-type="string" calcext:value-type="string">
            <text:p>CANT. AÑO 1</text:p>
          </table:table-cell>
          <table:table-cell table:style-name="ce606" office:value-type="string" calcext:value-type="string">
            <text:p>CANT. AÑO 2</text:p>
          </table:table-cell>
          <table:table-cell table:style-name="ce606" office:value-type="string" calcext:value-type="string">
            <text:p>CANT. AÑO 3, 4, 5</text:p>
          </table:table-cell>
          <table:table-cell table:style-name="ce606" office:value-type="string" calcext:value-type="string">
            <text:p>PRECIO UNITARIO </text:p>
          </table:table-cell>
          <table:table-cell table:style-name="ce606" office:value-type="string" calcext:value-type="string">
            <text:p>COSTO TOTAL AÑO 1</text:p>
          </table:table-cell>
          <table:table-cell table:style-name="ce606" office:value-type="string" calcext:value-type="string">
            <text:p>COSTO TOTAL AÑO 2</text:p>
          </table:table-cell>
          <table:table-cell table:style-name="ce606" office:value-type="string" calcext:value-type="string">
            <text:p>COSTO TOTAL AÑO 3,4,5</text:p>
          </table:table-cell>
          <table:table-cell table:style-name="ce275"/>
          <table:table-cell/>
          <table:table-cell table:style-name="ce220" table:number-columns-repeated="3"/>
          <table:table-cell table:number-columns-repeated="16370"/>
        </table:table-row>
        <table:table-row table:style-name="ro1">
          <table:table-cell table:style-name="ce296" office:value-type="string" calcext:value-type="string">
            <text:p>Cuy producida</text:p>
          </table:table-cell>
          <table:table-cell table:style-name="ce296" office:value-type="string" calcext:value-type="string">
            <text:p>Und</text:p>
          </table:table-cell>
          <table:table-cell table:style-name="ce91" table:formula="of:=[$INGRESOS.B9]" office:value-type="float" office:value="3185.70442141921" calcext:value-type="float">
            <text:p>3186</text:p>
          </table:table-cell>
          <table:table-cell table:style-name="ce91" table:formula="of:=[$INGRESOS.C9]" office:value-type="float" office:value="11443.696" calcext:value-type="float">
            <text:p>11444</text:p>
          </table:table-cell>
          <table:table-cell table:style-name="ce91" table:formula="of:=[$INGRESOS.D9]" office:value-type="float" office:value="11443.696" calcext:value-type="float">
            <text:p>11444</text:p>
          </table:table-cell>
          <table:table-cell table:style-name="ce632" table:formula="of:=+[.B43]" office:value-type="float" office:value="8.41" calcext:value-type="float">
            <text:p>8.41</text:p>
          </table:table-cell>
          <table:table-cell table:style-name="ce632" table:formula="of:=[.C39]*[.F39]" office:value-type="float" office:value="26791.7741841356" calcext:value-type="float">
            <text:p>26791.77</text:p>
          </table:table-cell>
          <table:table-cell table:style-name="ce632" table:formula="of:=[.D39]*[.F39]" office:value-type="float" office:value="96241.48336" calcext:value-type="float">
            <text:p>96241.48</text:p>
          </table:table-cell>
          <table:table-cell table:style-name="ce632" table:formula="of:=[.E39]*[.F39]" office:value-type="float" office:value="96241.48336" calcext:value-type="float">
            <text:p>96241.48</text:p>
          </table:table-cell>
          <table:table-cell table:style-name="ce275"/>
          <table:table-cell/>
          <table:table-cell table:style-name="ce220" table:number-columns-repeated="3"/>
          <table:table-cell table:number-columns-repeated="16370"/>
        </table:table-row>
        <table:table-row table:style-name="ro1">
          <table:table-cell table:style-name="ce296" office:value-type="string" calcext:value-type="string">
            <text:p>Insumos complementarios</text:p>
          </table:table-cell>
          <table:table-cell table:style-name="ce296" office:value-type="string" calcext:value-type="string">
            <text:p>Gl</text:p>
          </table:table-cell>
          <table:table-cell table:style-name="ce58" office:value-type="float" office:value="1000" calcext:value-type="float">
            <text:p>1000</text:p>
          </table:table-cell>
          <table:table-cell table:style-name="ce58" table:formula="of:=[.C40]*(1+0.2)" office:value-type="float" office:value="1200" calcext:value-type="float">
            <text:p>1200</text:p>
          </table:table-cell>
          <table:table-cell table:style-name="ce58" table:formula="of:=[.C40]*(1+0.2)" office:value-type="float" office:value="1200" calcext:value-type="float">
            <text:p>1200</text:p>
          </table:table-cell>
          <table:table-cell table:style-name="ce305" office:value-type="float" office:value="2" calcext:value-type="float">
            <text:p>2.00</text:p>
          </table:table-cell>
          <table:table-cell table:style-name="ce312" table:formula="of:=[.C40]*[.F40]" office:value-type="float" office:value="2000" calcext:value-type="float">
            <text:p>2000.00</text:p>
          </table:table-cell>
          <table:table-cell table:style-name="ce312" table:formula="of:=[.D40]*[.F40]" office:value-type="float" office:value="2400" calcext:value-type="float">
            <text:p>2400.00</text:p>
          </table:table-cell>
          <table:table-cell table:style-name="ce312" table:formula="of:=[.E40]*[.F40]" office:value-type="float" office:value="2400" calcext:value-type="float">
            <text:p>2400.00</text:p>
          </table:table-cell>
          <table:table-cell table:style-name="ce275"/>
          <table:table-cell/>
          <table:table-cell table:style-name="ce220" table:number-columns-repeated="3"/>
          <table:table-cell table:number-columns-repeated="16370"/>
        </table:table-row>
        <table:table-row table:style-name="ro1">
          <table:table-cell table:style-name="ce580" office:value-type="string" calcext:value-type="string" table:number-columns-spanned="6" table:number-rows-spanned="1">
            <text:p>TOTAL <text:s/>COSTOS DIRECTOS</text:p>
          </table:table-cell>
          <table:covered-table-cell table:number-columns-repeated="5" table:style-name="ce580"/>
          <table:table-cell table:style-name="ce632" table:formula="of:=[.G39]+[.G40]" office:value-type="float" office:value="28791.7741841356" calcext:value-type="float">
            <text:p>28791.77</text:p>
          </table:table-cell>
          <table:table-cell table:style-name="ce632" table:formula="of:=[.H39]+[.H40]" office:value-type="float" office:value="98641.48336" calcext:value-type="float">
            <text:p>98641.48</text:p>
          </table:table-cell>
          <table:table-cell table:style-name="ce632" table:formula="of:=[.I39]+[.I40]" office:value-type="float" office:value="98641.48336" calcext:value-type="float">
            <text:p>98641.48</text:p>
          </table:table-cell>
          <table:table-cell table:style-name="ce237"/>
          <table:table-cell table:style-name="ce220" table:number-columns-repeated="2"/>
          <table:table-cell table:number-columns-repeated="16372"/>
        </table:table-row>
        <table:table-row table:style-name="ro1">
          <table:table-cell table:style-name="ce581"/>
          <table:table-cell table:style-name="ce599" table:number-columns-repeated="3"/>
          <table:table-cell table:style-name="ce332" table:number-columns-repeated="3"/>
          <table:table-cell table:number-columns-repeated="2"/>
          <table:table-cell table:style-name="ce220" table:number-columns-repeated="3"/>
          <table:table-cell table:number-columns-repeated="16372"/>
        </table:table-row>
        <table:table-row table:style-name="ro1">
          <table:table-cell table:style-name="ce582" office:value-type="string" calcext:value-type="string">
            <text:p>Precio de produccion de Cuy por <text:s/>Und. =</text:p>
          </table:table-cell>
          <table:table-cell table:style-name="ce600" table:formula="of:=+[$INGRESOS.D27]" office:value-type="float" office:value="8.41" calcext:value-type="float">
            <text:p>8.41</text:p>
          </table:table-cell>
          <table:table-cell table:style-name="ce298" table:number-columns-repeated="2"/>
          <table:table-cell table:style-name="ce332" table:number-columns-repeated="3"/>
          <table:table-cell table:number-columns-repeated="2"/>
          <table:table-cell table:style-name="ce220" table:number-columns-repeated="3"/>
          <table:table-cell table:number-columns-repeated="16372"/>
        </table:table-row>
        <table:table-row table:style-name="ro1">
          <table:table-cell table:number-columns-repeated="4"/>
          <table:table-cell table:style-name="ce7" table:number-columns-repeated="3"/>
          <table:table-cell table:number-columns-repeated="16377"/>
        </table:table-row>
        <table:table-row table:style-name="ro1">
          <table:table-cell table:style-name="ce7"/>
          <table:table-cell table:number-columns-repeated="3"/>
          <table:table-cell table:style-name="ce7" table:number-columns-repeated="3"/>
          <table:table-cell table:style-name="ce633"/>
          <table:table-cell table:number-columns-repeated="16376"/>
        </table:table-row>
        <table:table-row table:style-name="ro1">
          <table:table-cell table:style-name="ce241" office:value-type="string" calcext:value-type="string">
            <text:p>I.2 COSTOS <text:s/>INDIRECTOS</text:p>
          </table:table-cell>
          <table:table-cell table:number-columns-repeated="3"/>
          <table:table-cell table:style-name="ce7" table:number-columns-repeated="3"/>
          <table:table-cell table:style-name="ce633"/>
          <table:table-cell table:number-columns-repeated="16376"/>
        </table:table-row>
        <table:table-row table:style-name="ro1">
          <table:table-cell table:style-name="ce241" office:value-type="string" calcext:value-type="string">
            <text:p>I.2.1 MATERIALES INDIRECTOS</text:p>
          </table:table-cell>
          <table:table-cell table:number-columns-repeated="3"/>
          <table:table-cell table:style-name="ce7" table:number-columns-repeated="3"/>
          <table:table-cell table:style-name="ce633"/>
          <table:table-cell table:number-columns-repeated="16376"/>
        </table:table-row>
        <table:table-row table:style-name="ro1">
          <table:table-cell table:style-name="ce7"/>
          <table:table-cell table:number-columns-repeated="3"/>
          <table:table-cell table:style-name="ce7" table:number-columns-repeated="3"/>
          <table:table-cell table:number-columns-repeated="16377"/>
        </table:table-row>
        <table:table-row table:style-name="ro13">
          <table:table-cell table:style-name="ce583" office:value-type="string" calcext:value-type="string">
            <text:p>CONCEPTO</text:p>
          </table:table-cell>
          <table:table-cell table:style-name="ce601" office:value-type="string" calcext:value-type="string">
            <text:p>U.Med</text:p>
          </table:table-cell>
          <table:table-cell table:style-name="ce601" office:value-type="string" calcext:value-type="string">
            <text:p>Cant. Año 1</text:p>
          </table:table-cell>
          <table:table-cell table:style-name="ce601" office:value-type="string" calcext:value-type="string">
            <text:p>Cant. Año 2</text:p>
          </table:table-cell>
          <table:table-cell table:style-name="ce601" office:value-type="string" calcext:value-type="string">
            <text:p>Cant. Año 3,4,5</text:p>
          </table:table-cell>
          <table:table-cell table:style-name="ce601" office:value-type="string" calcext:value-type="string">
            <text:p>P.Unit</text:p>
          </table:table-cell>
          <table:table-cell table:number-columns-repeated="3" table:style-name="ce601" office:value-type="string" calcext:value-type="string">
            <text:p>Costo total</text:p>
          </table:table-cell>
          <table:table-cell table:number-columns-repeated="16375"/>
        </table:table-row>
        <table:table-row table:style-name="ro1">
          <table:table-cell table:style-name="ce584" office:value-type="string" calcext:value-type="string">
            <text:p>Materiales de empaque </text:p>
          </table:table-cell>
          <table:table-cell table:style-name="ce254" office:value-type="string" calcext:value-type="string">
            <text:p>Global</text:p>
          </table:table-cell>
          <table:table-cell table:style-name="ce603" table:formula="of:=+[.C39]" office:value-type="float" office:value="3185.70442141921" calcext:value-type="float">
            <text:p>3185.70</text:p>
          </table:table-cell>
          <table:table-cell table:style-name="ce603" table:formula="of:=+[.D39]" office:value-type="float" office:value="11443.696" calcext:value-type="float">
            <text:p>11443.70</text:p>
          </table:table-cell>
          <table:table-cell table:style-name="ce603" table:formula="of:=+[.E39]" office:value-type="float" office:value="11443.696" calcext:value-type="float">
            <text:p>11443.70</text:p>
          </table:table-cell>
          <table:table-cell table:style-name="ce603" table:formula="of:=[.D18]" office:value-type="float" office:value="0.1" calcext:value-type="float">
            <text:p>0.10</text:p>
          </table:table-cell>
          <table:table-cell table:style-name="ce603" table:formula="of:=[.C50]*[.F50]" office:value-type="float" office:value="318.570442141921" calcext:value-type="float">
            <text:p>318.57</text:p>
          </table:table-cell>
          <table:table-cell table:style-name="ce603" table:formula="of:=[.D50]*[.F50]" office:value-type="float" office:value="1144.3696" calcext:value-type="float">
            <text:p>1144.37</text:p>
          </table:table-cell>
          <table:table-cell table:style-name="ce603" table:formula="of:=[.E50]*[.F50]" office:value-type="float" office:value="1144.3696" calcext:value-type="float">
            <text:p>1144.37</text:p>
          </table:table-cell>
          <table:table-cell table:number-columns-repeated="16375"/>
        </table:table-row>
        <table:table-row table:style-name="ro1">
          <table:table-cell table:style-name="ce585" table:formula="of:=[.A19]" office:value-type="string" office:string-value="Embalaje (caja de 12 unidades)" calcext:value-type="string">
            <text:p>Embalaje (caja de 12 unidades)</text:p>
          </table:table-cell>
          <table:table-cell table:style-name="ce254" table:formula="of:=[.B19]" office:value-type="string" office:string-value="Caja " calcext:value-type="string">
            <text:p>Caja </text:p>
          </table:table-cell>
          <table:table-cell table:style-name="ce262" table:formula="of:=[.C50]/12" office:value-type="float" office:value="265.475368451601" calcext:value-type="float">
            <text:p>265.48</text:p>
          </table:table-cell>
          <table:table-cell table:style-name="ce262" table:formula="of:=[.D50]/12" office:value-type="float" office:value="953.641333333333" calcext:value-type="float">
            <text:p>953.64</text:p>
          </table:table-cell>
          <table:table-cell table:style-name="ce262" table:formula="of:=[.E50]/12" office:value-type="float" office:value="953.641333333333" calcext:value-type="float">
            <text:p>953.64</text:p>
          </table:table-cell>
          <table:table-cell table:style-name="ce262" table:formula="of:=[.D19]" office:value-type="float" office:value="0.5" calcext:value-type="float">
            <text:p>0.50</text:p>
          </table:table-cell>
          <table:table-cell table:style-name="ce603" table:formula="of:=[.C51]*[.F51]" office:value-type="float" office:value="132.7376842258" calcext:value-type="float">
            <text:p>132.74</text:p>
          </table:table-cell>
          <table:table-cell table:style-name="ce603" table:formula="of:=[.D51]*[.F51]" office:value-type="float" office:value="476.820666666667" calcext:value-type="float">
            <text:p>476.82</text:p>
          </table:table-cell>
          <table:table-cell table:style-name="ce603" table:formula="of:=[.E51]*[.F51]" office:value-type="float" office:value="476.820666666667" calcext:value-type="float">
            <text:p>476.82</text:p>
          </table:table-cell>
          <table:table-cell table:number-columns-repeated="16375"/>
        </table:table-row>
        <table:table-row table:style-name="ro1">
          <table:table-cell table:style-name="ce586" office:value-type="string" calcext:value-type="string" table:number-columns-spanned="6" table:number-rows-spanned="1">
            <text:p>TOTAL MATERIALES INDIRECTOS</text:p>
          </table:table-cell>
          <table:covered-table-cell table:number-columns-repeated="5" table:style-name="ce586"/>
          <table:table-cell table:style-name="ce401" table:formula="of:=SUM([.G50:.G51])" office:value-type="float" office:value="451.308126367721" calcext:value-type="float">
            <text:p>451.31</text:p>
          </table:table-cell>
          <table:table-cell table:style-name="ce401" table:formula="of:=SUM([.H50:.H51])" office:value-type="float" office:value="1621.19026666667" calcext:value-type="float">
            <text:p>1621.19</text:p>
          </table:table-cell>
          <table:table-cell table:style-name="ce401" table:formula="of:=SUM([.I50:.I51])" office:value-type="float" office:value="1621.19026666667" calcext:value-type="float">
            <text:p>1621.19</text:p>
          </table:table-cell>
          <table:table-cell table:number-columns-repeated="16375"/>
        </table:table-row>
        <table:table-row table:style-name="ro1">
          <table:table-cell table:style-name="ce7"/>
          <table:table-cell table:number-columns-repeated="3"/>
          <table:table-cell table:style-name="ce7" table:number-columns-repeated="3"/>
          <table:table-cell table:number-columns-repeated="16377"/>
        </table:table-row>
        <table:table-row table:style-name="ro1">
          <table:table-cell table:style-name="ce587" office:value-type="string" calcext:value-type="string">
            <text:p>I.2.2 OTROS COSTOS INDIRECTOS</text:p>
          </table:table-cell>
          <table:table-cell table:style-name="ce241"/>
          <table:table-cell table:style-name="ce7"/>
          <table:table-cell/>
          <table:table-cell table:style-name="ce7" table:number-columns-repeated="3"/>
          <table:table-cell table:number-columns-repeated="16377"/>
        </table:table-row>
        <table:table-row table:style-name="ro13">
          <table:table-cell table:style-name="ce588" office:value-type="string" calcext:value-type="string">
            <text:p>CONCEPTO</text:p>
          </table:table-cell>
          <table:table-cell table:style-name="ce588" office:value-type="string" calcext:value-type="string">
            <text:p>CANTIDAD </text:p>
          </table:table-cell>
          <table:table-cell table:style-name="ce612" office:value-type="string" calcext:value-type="string">
            <text:p>COSTO TOTAL ANUAL</text:p>
          </table:table-cell>
          <table:table-cell/>
          <table:table-cell table:style-name="ce7" table:number-columns-repeated="3"/>
          <table:table-cell table:number-columns-repeated="16377"/>
        </table:table-row>
        <table:table-row table:style-name="ro1">
          <table:table-cell table:style-name="ce584" office:value-type="string" calcext:value-type="string">
            <text:p>Articulos de Limpieza</text:p>
          </table:table-cell>
          <table:table-cell table:style-name="ce254" office:value-type="string" calcext:value-type="string">
            <text:p>Global</text:p>
          </table:table-cell>
          <table:table-cell table:style-name="ce613" table:formula="of:=[.E13]" office:value-type="float" office:value="180" calcext:value-type="float">
            <text:p><text:s/>180.00 </text:p>
          </table:table-cell>
          <table:table-cell/>
          <table:table-cell table:style-name="ce7" table:number-columns-repeated="3"/>
          <table:table-cell table:number-columns-repeated="16377"/>
        </table:table-row>
        <table:table-row table:style-name="ro1">
          <table:table-cell table:style-name="ce584" office:value-type="string" calcext:value-type="string">
            <text:p>Servicios de matenimiento y reparaciones</text:p>
          </table:table-cell>
          <table:table-cell table:style-name="ce254" office:value-type="string" calcext:value-type="string">
            <text:p>Global</text:p>
          </table:table-cell>
          <table:table-cell table:style-name="ce613" table:formula="of:=[.E27]" office:value-type="float" office:value="600" calcext:value-type="float">
            <text:p><text:s/>600.00 </text:p>
          </table:table-cell>
          <table:table-cell/>
          <table:table-cell table:style-name="ce7" table:number-columns-repeated="3"/>
          <table:table-cell table:number-columns-repeated="4"/>
          <table:table-cell table:style-name="ce633"/>
          <table:table-cell table:number-columns-repeated="16372"/>
        </table:table-row>
        <table:table-row table:style-name="ro1">
          <table:table-cell table:style-name="ce584" office:value-type="string" calcext:value-type="string">
            <text:p>Servicios basicos</text:p>
          </table:table-cell>
          <table:table-cell table:style-name="ce254" office:value-type="string" calcext:value-type="string">
            <text:p>Global</text:p>
          </table:table-cell>
          <table:table-cell table:style-name="ce614" table:formula="of:=[.E8]" office:value-type="float" office:value="624" calcext:value-type="float">
            <text:p><text:s/>624.00 </text:p>
          </table:table-cell>
          <table:table-cell/>
          <table:table-cell table:style-name="ce7" table:number-columns-repeated="3"/>
          <table:table-cell table:number-columns-repeated="16377"/>
        </table:table-row>
        <table:table-row table:style-name="ro1">
          <table:table-cell table:style-name="ce589" office:value-type="string" calcext:value-type="string">
            <text:p>TOTAL OTROS COSTOS INDIRECTOS</text:p>
          </table:table-cell>
          <table:table-cell table:style-name="ce256" office:value-type="string" calcext:value-type="string">
            <text:p>Global</text:p>
          </table:table-cell>
          <table:table-cell table:style-name="ce615" table:formula="of:=SUM([.C56:.C58])" office:value-type="float" office:value="1404" calcext:value-type="float">
            <text:p><text:s/>1,404.00 </text:p>
          </table:table-cell>
          <table:table-cell/>
          <table:table-cell table:style-name="ce7" table:number-columns-repeated="3"/>
          <table:table-cell table:number-columns-repeated="16377"/>
        </table:table-row>
        <table:table-row table:style-name="ro1">
          <table:table-cell table:style-name="ce587"/>
          <table:table-cell table:style-name="ce602"/>
          <table:table-cell table:style-name="ce616"/>
          <table:table-cell/>
          <table:table-cell table:style-name="ce7" table:number-columns-repeated="3"/>
          <table:table-cell table:style-name="ce634" office:value-type="string" calcext:value-type="string" table:number-columns-spanned="6" table:number-rows-spanned="1">
            <text:p>COSTOS DE PRODUCCION PROYECTADOS</text:p>
          </table:table-cell>
          <table:covered-table-cell table:number-columns-repeated="5" table:style-name="ce634"/>
          <table:table-cell table:number-columns-repeated="16371"/>
        </table:table-row>
        <table:table-row table:style-name="ro1">
          <table:table-cell table:style-name="ce590" office:value-type="string" calcext:value-type="string" table:number-columns-spanned="2" table:number-rows-spanned="1">
            <text:p>I. COSTOS DE PRODUCCION</text:p>
          </table:table-cell>
          <table:covered-table-cell table:style-name="ce590"/>
          <table:table-cell table:style-name="ce616"/>
          <table:table-cell/>
          <table:table-cell table:style-name="ce7" table:number-columns-repeated="3"/>
          <table:table-cell table:style-name="ce310" office:value-type="string" calcext:value-type="string" table:number-columns-spanned="1" table:number-rows-spanned="2">
            <text:p>CONCEPTO</text:p>
          </table:table-cell>
          <table:table-cell table:style-name="ce310" office:value-type="string" calcext:value-type="string" table:number-columns-spanned="5" table:number-rows-spanned="1">
            <text:p>AÑOS</text:p>
          </table:table-cell>
          <table:covered-table-cell table:number-columns-repeated="3" table:style-name="ce642"/>
          <table:covered-table-cell table:style-name="ce643"/>
          <table:table-cell table:number-columns-repeated="16371"/>
        </table:table-row>
        <table:table-row table:style-name="ro1">
          <table:table-cell table:style-name="ce226" office:value-type="string" calcext:value-type="string">
            <text:p>CONCEPTO</text:p>
          </table:table-cell>
          <table:table-cell table:style-name="ce226" office:value-type="string" calcext:value-type="string">
            <text:p>COSTO TOTAL</text:p>
          </table:table-cell>
          <table:table-cell table:style-name="ce616"/>
          <table:table-cell/>
          <table:table-cell table:style-name="ce7" table:number-columns-repeated="3"/>
          <table:covered-table-cell table:style-name="ce635"/>
          <table:table-cell table:style-name="ce310" office:value-type="float" office:value="1" calcext:value-type="float">
            <text:p>1</text:p>
          </table:table-cell>
          <table:table-cell table:style-name="ce310" office:value-type="float" office:value="2" calcext:value-type="float">
            <text:p>2</text:p>
          </table:table-cell>
          <table:table-cell table:style-name="ce310" office:value-type="float" office:value="3" calcext:value-type="float">
            <text:p>3</text:p>
          </table:table-cell>
          <table:table-cell table:style-name="ce310" office:value-type="float" office:value="4" calcext:value-type="float">
            <text:p>4</text:p>
          </table:table-cell>
          <table:table-cell table:style-name="ce310" office:value-type="float" office:value="5" calcext:value-type="float">
            <text:p>5</text:p>
          </table:table-cell>
          <table:table-cell table:number-columns-repeated="16371"/>
        </table:table-row>
        <table:table-row table:style-name="ro1">
          <table:table-cell table:style-name="ce591" office:value-type="string" calcext:value-type="string">
            <text:p>I.1 COSTOS DIRECTOS</text:p>
          </table:table-cell>
          <table:table-cell table:style-name="ce401" table:formula="of:=SUM([.B64:.B65])" office:value-type="float" office:value="41751.7741841356" calcext:value-type="float">
            <text:p>41751.77</text:p>
          </table:table-cell>
          <table:table-cell table:style-name="ce616"/>
          <table:table-cell/>
          <table:table-cell table:style-name="ce7" table:number-columns-repeated="3"/>
          <table:table-cell table:style-name="ce295" table:formula="of:=[.A63]" office:value-type="string" office:string-value="I.1 COSTOS DIRECTOS" calcext:value-type="string">
            <text:p>I.1 COSTOS DIRECTOS</text:p>
          </table:table-cell>
          <table:table-cell table:style-name="ce638" table:formula="of:=[.I64]+[.I67]" office:value-type="float" office:value="41751.7741841356" calcext:value-type="float">
            <text:p>41,751.77</text:p>
          </table:table-cell>
          <table:table-cell table:style-name="ce638" table:formula="of:=[.J64]+[.J67]" office:value-type="float" office:value="111601.48336" calcext:value-type="float">
            <text:p>111,601.48</text:p>
          </table:table-cell>
          <table:table-cell table:style-name="ce638" table:formula="of:=[.K64]+[.K67]" office:value-type="float" office:value="111601.48336" calcext:value-type="float">
            <text:p>111,601.48</text:p>
          </table:table-cell>
          <table:table-cell table:style-name="ce638" table:formula="of:=[.L64]+[.L67]" office:value-type="float" office:value="111601.48336" calcext:value-type="float">
            <text:p>111,601.48</text:p>
          </table:table-cell>
          <table:table-cell table:style-name="ce638" table:formula="of:=[.M64]+[.M67]" office:value-type="float" office:value="111601.48336" calcext:value-type="float">
            <text:p>111,601.48</text:p>
          </table:table-cell>
          <table:table-cell table:number-columns-repeated="16371"/>
        </table:table-row>
        <table:table-row table:style-name="ro1">
          <table:table-cell table:style-name="ce584" office:value-type="string" calcext:value-type="string">
            <text:p>I.1.1 Materiales Directos</text:p>
          </table:table-cell>
          <table:table-cell table:style-name="ce603" table:formula="of:=[.G41]" office:value-type="float" office:value="28791.7741841356" calcext:value-type="float">
            <text:p>28791.77</text:p>
          </table:table-cell>
          <table:table-cell table:style-name="ce603" table:formula="of:=[.H41]" office:value-type="float" office:value="98641.48336" calcext:value-type="float">
            <text:p>98641.48</text:p>
          </table:table-cell>
          <table:table-cell table:style-name="ce603" table:formula="of:=[.I41]" office:value-type="float" office:value="98641.48336" calcext:value-type="float">
            <text:p>98641.48</text:p>
          </table:table-cell>
          <table:table-cell table:style-name="ce7" table:number-columns-repeated="3"/>
          <table:table-cell table:style-name="ce636" table:formula="of:=[.A64]" office:value-type="string" office:string-value="I.1.1 Materiales Directos" calcext:value-type="string">
            <text:p>I.1.1 Materiales Directos</text:p>
          </table:table-cell>
          <table:table-cell table:style-name="ce639" table:formula="of:=SUM([.I65:.I66])" office:value-type="float" office:value="28791.7741841356" calcext:value-type="float">
            <text:p>28,791.77</text:p>
          </table:table-cell>
          <table:table-cell table:style-name="ce639" table:formula="of:=SUM([.J65:.J66])" office:value-type="float" office:value="98641.48336" calcext:value-type="float">
            <text:p>98,641.48</text:p>
          </table:table-cell>
          <table:table-cell table:style-name="ce639" table:formula="of:=SUM([.K65:.K66])" office:value-type="float" office:value="98641.48336" calcext:value-type="float">
            <text:p>98,641.48</text:p>
          </table:table-cell>
          <table:table-cell table:style-name="ce639" table:formula="of:=SUM([.L65:.L66])" office:value-type="float" office:value="98641.48336" calcext:value-type="float">
            <text:p>98,641.48</text:p>
          </table:table-cell>
          <table:table-cell table:style-name="ce639" table:formula="of:=SUM([.M65:.M66])" office:value-type="float" office:value="98641.48336" calcext:value-type="float">
            <text:p>98,641.48</text:p>
          </table:table-cell>
          <table:table-cell table:number-columns-repeated="16371"/>
        </table:table-row>
        <table:table-row table:style-name="ro1">
          <table:table-cell table:style-name="ce584" office:value-type="string" calcext:value-type="string">
            <text:p>I.1.2 Mano de Obra Directa</text:p>
          </table:table-cell>
          <table:table-cell table:style-name="ce603" table:formula="of:=[$REMUNERACION.F5]" office:value-type="float" office:value="12960" calcext:value-type="float">
            <text:p>12960.00</text:p>
          </table:table-cell>
          <table:table-cell table:style-name="ce616"/>
          <table:table-cell/>
          <table:table-cell table:style-name="ce7" table:number-columns-repeated="3"/>
          <table:table-cell table:style-name="ce636" office:value-type="string" calcext:value-type="string">
            <text:p>Cuy Producida</text:p>
          </table:table-cell>
          <table:table-cell table:style-name="ce639" table:formula="of:=[.G39]" office:value-type="float" office:value="26791.7741841356" calcext:value-type="float">
            <text:p>26,791.77</text:p>
          </table:table-cell>
          <table:table-cell table:style-name="ce639" table:formula="of:=[.H39]" office:value-type="float" office:value="96241.48336" calcext:value-type="float">
            <text:p>96,241.48</text:p>
          </table:table-cell>
          <table:table-cell table:style-name="ce639" table:formula="of:=[.I39]" office:value-type="float" office:value="96241.48336" calcext:value-type="float">
            <text:p>96,241.48</text:p>
          </table:table-cell>
          <table:table-cell table:style-name="ce639" table:formula="of:=+[.K65]" office:value-type="float" office:value="96241.48336" calcext:value-type="float">
            <text:p>96,241.48</text:p>
          </table:table-cell>
          <table:table-cell table:style-name="ce639" table:formula="of:=+[.L65]" office:value-type="float" office:value="96241.48336" calcext:value-type="float">
            <text:p>96,241.48</text:p>
          </table:table-cell>
          <table:table-cell table:number-columns-repeated="16371"/>
        </table:table-row>
        <table:table-row table:style-name="ro1">
          <table:table-cell table:style-name="ce591" office:value-type="string" calcext:value-type="string">
            <text:p>I.2 COSTOS INDIRECTOS</text:p>
          </table:table-cell>
          <table:table-cell table:style-name="ce401" table:formula="of:=[.B67]+[.B68]+[.B69]" office:value-type="float" office:value="3655.30812636772" calcext:value-type="float">
            <text:p>3655.31</text:p>
          </table:table-cell>
          <table:table-cell table:style-name="ce616"/>
          <table:table-cell/>
          <table:table-cell table:style-name="ce7" table:number-columns-repeated="3"/>
          <table:table-cell table:style-name="ce636" office:value-type="string" calcext:value-type="string">
            <text:p>Insumos complementarios</text:p>
          </table:table-cell>
          <table:table-cell table:style-name="ce639" table:formula="of:=[.G40]" office:value-type="float" office:value="2000" calcext:value-type="float">
            <text:p>2,000.00</text:p>
          </table:table-cell>
          <table:table-cell table:style-name="ce639" table:formula="of:=[.H40]" office:value-type="float" office:value="2400" calcext:value-type="float">
            <text:p>2,400.00</text:p>
          </table:table-cell>
          <table:table-cell table:style-name="ce639" table:formula="of:=[.I40]" office:value-type="float" office:value="2400" calcext:value-type="float">
            <text:p>2,400.00</text:p>
          </table:table-cell>
          <table:table-cell table:style-name="ce639" table:formula="of:=+[.K66]" office:value-type="float" office:value="2400" calcext:value-type="float">
            <text:p>2,400.00</text:p>
          </table:table-cell>
          <table:table-cell table:style-name="ce639" table:formula="of:=+[.L66]" office:value-type="float" office:value="2400" calcext:value-type="float">
            <text:p>2,400.00</text:p>
          </table:table-cell>
          <table:table-cell table:number-columns-repeated="16371"/>
        </table:table-row>
        <table:table-row table:style-name="ro1">
          <table:table-cell table:style-name="ce584" office:value-type="string" calcext:value-type="string">
            <text:p>I.2.1 Materiales Indirectos</text:p>
          </table:table-cell>
          <table:table-cell table:style-name="ce603" table:formula="of:=[.G52]" office:value-type="float" office:value="451.308126367721" calcext:value-type="float">
            <text:p>451.31</text:p>
          </table:table-cell>
          <table:table-cell table:style-name="ce603" table:formula="of:=[.H52]" office:value-type="float" office:value="1621.19026666667" calcext:value-type="float">
            <text:p>1621.19</text:p>
          </table:table-cell>
          <table:table-cell table:style-name="ce603" table:formula="of:=[.I52]" office:value-type="float" office:value="1621.19026666667" calcext:value-type="float">
            <text:p>1621.19</text:p>
          </table:table-cell>
          <table:table-cell table:style-name="ce7" table:number-columns-repeated="3"/>
          <table:table-cell table:style-name="ce636" table:formula="of:=[.A65]" office:value-type="string" office:string-value="I.1.2 Mano de Obra Directa" calcext:value-type="string">
            <text:p>I.1.2 Mano de Obra Directa</text:p>
          </table:table-cell>
          <table:table-cell table:style-name="ce639" table:formula="of:=[.B65]" office:value-type="float" office:value="12960" calcext:value-type="float">
            <text:p>12,960.00</text:p>
          </table:table-cell>
          <table:table-cell table:style-name="ce639" table:formula="of:=[.I67]" office:value-type="float" office:value="12960" calcext:value-type="float">
            <text:p>12,960.00</text:p>
          </table:table-cell>
          <table:table-cell table:style-name="ce639" table:formula="of:=[.J67]" office:value-type="float" office:value="12960" calcext:value-type="float">
            <text:p>12,960.00</text:p>
          </table:table-cell>
          <table:table-cell table:style-name="ce639" table:formula="of:=[.K67]" office:value-type="float" office:value="12960" calcext:value-type="float">
            <text:p>12,960.00</text:p>
          </table:table-cell>
          <table:table-cell table:style-name="ce639" table:formula="of:=[.L67]" office:value-type="float" office:value="12960" calcext:value-type="float">
            <text:p>12,960.00</text:p>
          </table:table-cell>
          <table:table-cell table:number-columns-repeated="16371"/>
        </table:table-row>
        <table:table-row table:style-name="ro1">
          <table:table-cell table:style-name="ce584" office:value-type="string" calcext:value-type="string">
            <text:p>I.2.2 Mano de Obra Indirecta</text:p>
          </table:table-cell>
          <table:table-cell table:style-name="ce604" table:formula="of:=[$REMUNERACION.F8]" office:value-type="float" office:value="1800" calcext:value-type="float">
            <text:p>1800.00</text:p>
          </table:table-cell>
          <table:table-cell table:number-columns-repeated="2"/>
          <table:table-cell table:style-name="ce7" table:number-columns-repeated="3"/>
          <table:table-cell table:style-name="ce295" table:formula="of:=[.A66]" office:value-type="string" office:string-value="I.2 COSTOS INDIRECTOS" calcext:value-type="string">
            <text:p>I.2 COSTOS INDIRECTOS</text:p>
          </table:table-cell>
          <table:table-cell table:style-name="ce639" table:formula="of:=SUM([.I69:.I71])" office:value-type="float" office:value="3655.30812636772" calcext:value-type="float">
            <text:p>3,655.31</text:p>
          </table:table-cell>
          <table:table-cell table:style-name="ce639" table:formula="of:=SUM([.J69:.J71])" office:value-type="float" office:value="4825.19026666667" calcext:value-type="float">
            <text:p>4,825.19</text:p>
          </table:table-cell>
          <table:table-cell table:style-name="ce639" table:formula="of:=SUM([.K69:.K71])" office:value-type="float" office:value="4825.19026666667" calcext:value-type="float">
            <text:p>4,825.19</text:p>
          </table:table-cell>
          <table:table-cell table:style-name="ce639" table:formula="of:=SUM([.L69:.L71])" office:value-type="float" office:value="4825.19026666667" calcext:value-type="float">
            <text:p>4,825.19</text:p>
          </table:table-cell>
          <table:table-cell table:style-name="ce639" table:formula="of:=SUM([.M69:.M71])" office:value-type="float" office:value="4825.19026666667" calcext:value-type="float">
            <text:p>4,825.19</text:p>
          </table:table-cell>
          <table:table-cell table:number-columns-repeated="16371"/>
        </table:table-row>
        <table:table-row table:style-name="ro1">
          <table:table-cell table:style-name="ce584" office:value-type="string" calcext:value-type="string">
            <text:p>I.2.3 Otros costos indirectos</text:p>
          </table:table-cell>
          <table:table-cell table:style-name="ce603" table:formula="of:=[.C59]" office:value-type="float" office:value="1404" calcext:value-type="float">
            <text:p>1404.00</text:p>
          </table:table-cell>
          <table:table-cell table:number-columns-repeated="2"/>
          <table:table-cell table:style-name="ce7" table:number-columns-repeated="3"/>
          <table:table-cell table:style-name="ce636" table:formula="of:=[.A67]" office:value-type="string" office:string-value="I.2.1 Materiales Indirectos" calcext:value-type="string">
            <text:p>I.2.1 Materiales Indirectos</text:p>
          </table:table-cell>
          <table:table-cell table:style-name="ce639" table:formula="of:=[.B67]" office:value-type="float" office:value="451.308126367721" calcext:value-type="float">
            <text:p>451.31</text:p>
          </table:table-cell>
          <table:table-cell table:style-name="ce639" table:formula="of:=[.C67]" office:value-type="float" office:value="1621.19026666667" calcext:value-type="float">
            <text:p>1,621.19</text:p>
          </table:table-cell>
          <table:table-cell table:style-name="ce639" table:formula="of:=[.D67]" office:value-type="float" office:value="1621.19026666667" calcext:value-type="float">
            <text:p>1,621.19</text:p>
          </table:table-cell>
          <table:table-cell table:style-name="ce639" table:formula="of:=+[.K69]" office:value-type="float" office:value="1621.19026666667" calcext:value-type="float">
            <text:p>1,621.19</text:p>
          </table:table-cell>
          <table:table-cell table:style-name="ce639" table:formula="of:=[.L69]" office:value-type="float" office:value="1621.19026666667" calcext:value-type="float">
            <text:p>1,621.19</text:p>
          </table:table-cell>
          <table:table-cell table:number-columns-repeated="16371"/>
        </table:table-row>
        <table:table-row table:style-name="ro1">
          <table:table-cell table:style-name="ce592" office:value-type="string" calcext:value-type="string">
            <text:p>TOTAL COSTOS DE PRODUCCION</text:p>
          </table:table-cell>
          <table:table-cell table:style-name="ce605" table:formula="of:=[.B63]+[.B66]" office:value-type="float" office:value="45407.0823105033" calcext:value-type="float">
            <text:p>45407.08</text:p>
          </table:table-cell>
          <table:table-cell table:style-name="ce617"/>
          <table:table-cell/>
          <table:table-cell table:style-name="ce7" table:number-columns-repeated="3"/>
          <table:table-cell table:style-name="ce636" table:formula="of:=[.A68]" office:value-type="string" office:string-value="I.2.2 Mano de Obra Indirecta" calcext:value-type="string">
            <text:p>I.2.2 Mano de Obra Indirecta</text:p>
          </table:table-cell>
          <table:table-cell table:style-name="ce639" table:formula="of:=[.B68]" office:value-type="float" office:value="1800" calcext:value-type="float">
            <text:p>1,800.00</text:p>
          </table:table-cell>
          <table:table-cell table:style-name="ce639" table:formula="of:=[.I70]" office:value-type="float" office:value="1800" calcext:value-type="float">
            <text:p>1,800.00</text:p>
          </table:table-cell>
          <table:table-cell table:style-name="ce639" table:formula="of:=[.J70]" office:value-type="float" office:value="1800" calcext:value-type="float">
            <text:p>1,800.00</text:p>
          </table:table-cell>
          <table:table-cell table:style-name="ce639" table:formula="of:=[.K70]" office:value-type="float" office:value="1800" calcext:value-type="float">
            <text:p>1,800.00</text:p>
          </table:table-cell>
          <table:table-cell table:style-name="ce639" table:formula="of:=[.L70]" office:value-type="float" office:value="1800" calcext:value-type="float">
            <text:p>1,800.00</text:p>
          </table:table-cell>
          <table:table-cell table:number-columns-repeated="16371"/>
        </table:table-row>
        <table:table-row table:style-name="ro1">
          <table:table-cell table:style-name="ce593"/>
          <table:table-cell table:style-name="ce248"/>
          <table:table-cell table:number-columns-repeated="2"/>
          <table:table-cell table:style-name="ce7" table:number-columns-repeated="3"/>
          <table:table-cell table:style-name="ce636" table:formula="of:=[.A69]" office:value-type="string" office:string-value="I.2.3 Otros costos indirectos" calcext:value-type="string">
            <text:p>I.2.3 Otros costos indirectos</text:p>
          </table:table-cell>
          <table:table-cell table:style-name="ce639" table:formula="of:=[.B69]" office:value-type="float" office:value="1404" calcext:value-type="float">
            <text:p>1,404.00</text:p>
          </table:table-cell>
          <table:table-cell table:style-name="ce639" table:formula="of:=[.I71]" office:value-type="float" office:value="1404" calcext:value-type="float">
            <text:p>1,404.00</text:p>
          </table:table-cell>
          <table:table-cell table:style-name="ce639" table:formula="of:=[.J71]" office:value-type="float" office:value="1404" calcext:value-type="float">
            <text:p>1,404.00</text:p>
          </table:table-cell>
          <table:table-cell table:style-name="ce639" table:formula="of:=[.K71]" office:value-type="float" office:value="1404" calcext:value-type="float">
            <text:p>1,404.00</text:p>
          </table:table-cell>
          <table:table-cell table:style-name="ce639" table:formula="of:=[.L71]" office:value-type="float" office:value="1404" calcext:value-type="float">
            <text:p>1,404.00</text:p>
          </table:table-cell>
          <table:table-cell table:number-columns-repeated="16371"/>
        </table:table-row>
        <table:table-row table:style-name="ro1">
          <table:table-cell table:style-name="ce7"/>
          <table:table-cell table:number-columns-repeated="3"/>
          <table:table-cell table:style-name="ce7" table:number-columns-repeated="3"/>
          <table:table-cell table:style-name="ce300" table:formula="of:=[.A70]" office:value-type="string" office:string-value="TOTAL COSTOS DE PRODUCCION" calcext:value-type="string">
            <text:p>TOTAL COSTOS DE PRODUCCION</text:p>
          </table:table-cell>
          <table:table-cell table:style-name="ce640" table:formula="of:=[.I63]+[.I68]" office:value-type="float" office:value="45407.0823105033" calcext:value-type="float">
            <text:p>45,407.08</text:p>
          </table:table-cell>
          <table:table-cell table:style-name="ce640" table:formula="of:=[.J63]+[.J68]" office:value-type="float" office:value="116426.673626667" calcext:value-type="float">
            <text:p>116,426.67</text:p>
          </table:table-cell>
          <table:table-cell table:style-name="ce640" table:formula="of:=[.K63]+[.K68]" office:value-type="float" office:value="116426.673626667" calcext:value-type="float">
            <text:p>116,426.67</text:p>
          </table:table-cell>
          <table:table-cell table:style-name="ce640" table:formula="of:=[.L63]+[.L68]" office:value-type="float" office:value="116426.673626667" calcext:value-type="float">
            <text:p>116,426.67</text:p>
          </table:table-cell>
          <table:table-cell table:style-name="ce640" table:formula="of:=[.M63]+[.M68]" office:value-type="float" office:value="116426.673626667" calcext:value-type="float">
            <text:p>116,426.67</text:p>
          </table:table-cell>
          <table:table-cell table:number-columns-repeated="16371"/>
        </table:table-row>
        <table:table-row table:style-name="ro1">
          <table:table-cell table:number-columns-repeated="7"/>
          <table:table-cell table:style-name="ce637" office:value-type="string" calcext:value-type="string" table:number-columns-spanned="6" table:number-rows-spanned="1">
            <text:p>NOTA: SE ESTA CONSIDERANDO UN INCREMENTO DEL 20 % ANUAL DE MATERIAS PRIMAS E INSUMOS</text:p>
          </table:table-cell>
          <table:covered-table-cell table:number-columns-repeated="5" table:style-name="ce637"/>
          <table:table-cell table:number-columns-repeated="16371"/>
        </table:table-row>
        <table:table-row table:style-name="ro1">
          <table:table-cell table:style-name="ce578" office:value-type="string" calcext:value-type="string" table:number-columns-spanned="5" table:number-rows-spanned="1">
            <text:p>II. GASTOS DE OPERACIÓN</text:p>
          </table:table-cell>
          <table:covered-table-cell table:number-columns-repeated="4" table:style-name="ce597"/>
          <table:table-cell table:style-name="ce631" table:number-columns-repeated="2"/>
          <table:table-cell table:style-name="ce7"/>
          <table:table-cell table:number-columns-repeated="16376"/>
        </table:table-row>
        <table:table-row table:style-name="ro1" table:number-rows-repeated="2">
          <table:table-cell table:number-columns-repeated="16384"/>
        </table:table-row>
        <table:table-row table:style-name="ro1">
          <table:table-cell table:style-name="ce286" office:value-type="string" calcext:value-type="string">
            <text:p>II.1 GASTOS DE VENTA</text:p>
          </table:table-cell>
          <table:table-cell/>
          <table:table-cell table:style-name="ce7" table:number-columns-repeated="2"/>
          <table:table-cell table:number-columns-repeated="16380"/>
        </table:table-row>
        <table:table-row table:style-name="ro1">
          <table:table-cell table:style-name="ce579" office:value-type="string" calcext:value-type="string">
            <text:p>CONCEPTO</text:p>
          </table:table-cell>
          <table:table-cell table:style-name="ce606" office:value-type="string" calcext:value-type="string">
            <text:p>COSTO TOTAL</text:p>
          </table:table-cell>
          <table:table-cell/>
          <table:table-cell table:style-name="ce620"/>
          <table:table-cell table:number-columns-repeated="16380"/>
        </table:table-row>
        <table:table-row table:style-name="ro1">
          <table:table-cell table:style-name="ce295" table:formula="of:=[$REMUNERACION.A10]" office:value-type="string" office:string-value="MANO DE OBRA VENTA" calcext:value-type="string">
            <text:p>MANO DE OBRA VENTA</text:p>
          </table:table-cell>
          <table:table-cell table:style-name="ce316" table:formula="of:=+[.B80]" office:value-type="float" office:value="1152" calcext:value-type="float">
            <text:p><text:s/>1,152.00 </text:p>
          </table:table-cell>
          <table:table-cell/>
          <table:table-cell table:style-name="ce298"/>
          <table:table-cell table:number-columns-repeated="16380"/>
        </table:table-row>
        <table:table-row table:style-name="ro1">
          <table:table-cell table:style-name="ce296" office:value-type="string" calcext:value-type="string">
            <text:p>Personal encargado de la venta</text:p>
          </table:table-cell>
          <table:table-cell table:style-name="ce317" table:formula="of:=[$REMUNERACION.F11]" office:value-type="float" office:value="1152" calcext:value-type="float">
            <text:p><text:s/>1,152.00 </text:p>
          </table:table-cell>
          <table:table-cell/>
          <table:table-cell table:style-name="ce298"/>
          <table:table-cell table:number-columns-repeated="16380"/>
        </table:table-row>
        <table:table-row table:style-name="ro1">
          <table:table-cell table:style-name="ce295" office:value-type="string" calcext:value-type="string">
            <text:p>OTROS GASTOS DE VENTA</text:p>
          </table:table-cell>
          <table:table-cell table:style-name="ce316" table:formula="of:=[.B83]+[.B82]" office:value-type="float" office:value="1987" calcext:value-type="float">
            <text:p><text:s/>1,987.00 </text:p>
          </table:table-cell>
          <table:table-cell/>
          <table:table-cell table:style-name="ce326"/>
          <table:table-cell table:number-columns-repeated="16380"/>
        </table:table-row>
        <table:table-row table:style-name="ro1">
          <table:table-cell table:style-name="ce296" table:formula="of:=[$'CAP TRABAJ'.A24]" office:value-type="string" office:string-value="Otros Servicios" calcext:value-type="string">
            <text:p>Otros Servicios</text:p>
          </table:table-cell>
          <table:table-cell table:style-name="ce317" table:formula="of:=+[.E31]" office:value-type="float" office:value="1387" calcext:value-type="float">
            <text:p><text:s/>1,387.00 </text:p>
          </table:table-cell>
          <table:table-cell/>
          <table:table-cell table:style-name="ce298"/>
          <table:table-cell table:number-columns-repeated="16380"/>
        </table:table-row>
        <table:table-row table:style-name="ro1">
          <table:table-cell table:style-name="ce296" office:value-type="string" calcext:value-type="string">
            <text:p>Publicidad y Marketing</text:p>
          </table:table-cell>
          <table:table-cell table:style-name="ce317" table:formula="of:=50*12" office:value-type="float" office:value="600" calcext:value-type="float">
            <text:p><text:s/>600.00 </text:p>
          </table:table-cell>
          <table:table-cell/>
          <table:table-cell table:style-name="ce298"/>
          <table:table-cell table:number-columns-repeated="16380"/>
        </table:table-row>
        <table:table-row table:style-name="ro1">
          <table:table-cell table:style-name="ce295" office:value-type="string" calcext:value-type="string">
            <text:p>TOTAL GASTOS DE VENTA</text:p>
          </table:table-cell>
          <table:table-cell table:style-name="ce316" table:formula="of:=[.B79]+[.B81]" office:value-type="float" office:value="3139" calcext:value-type="float">
            <text:p><text:s/>3,139.00 </text:p>
          </table:table-cell>
          <table:table-cell/>
          <table:table-cell table:style-name="ce326"/>
          <table:table-cell table:number-columns-repeated="16380"/>
        </table:table-row>
        <table:table-row table:style-name="ro1">
          <table:table-cell table:style-name="ce326" table:number-columns-repeated="3"/>
          <table:table-cell table:style-name="ce332"/>
          <table:table-cell table:number-columns-repeated="16380"/>
        </table:table-row>
        <table:table-row table:style-name="ro22">
          <table:table-cell table:style-name="ce326" table:number-columns-repeated="3"/>
          <table:table-cell table:style-name="ce332"/>
          <table:table-cell table:number-columns-repeated="16380"/>
        </table:table-row>
        <table:table-row table:style-name="ro40">
          <table:table-cell table:style-name="ce590" office:value-type="string" calcext:value-type="string" table:number-columns-spanned="2" table:number-rows-spanned="1">
            <text:p>II. GASTOS DE OPERACION</text:p>
          </table:table-cell>
          <table:covered-table-cell table:style-name="ce590"/>
          <table:table-cell table:number-columns-repeated="16382"/>
        </table:table-row>
        <table:table-row table:style-name="ro1">
          <table:table-cell table:style-name="ce300" office:value-type="string" calcext:value-type="string">
            <text:p>CONCEPTO</text:p>
          </table:table-cell>
          <table:table-cell table:style-name="ce300" office:value-type="string" calcext:value-type="string">
            <text:p>COSTO TOTAL</text:p>
          </table:table-cell>
          <table:table-cell table:number-columns-repeated="5"/>
          <table:table-cell table:style-name="ce633" table:number-columns-repeated="2"/>
          <table:table-cell table:number-columns-repeated="16375"/>
        </table:table-row>
        <table:table-row table:style-name="ro1">
          <table:table-cell table:style-name="ce295" office:value-type="string" calcext:value-type="string">
            <text:p>I. GASTOS EN VENTAS</text:p>
          </table:table-cell>
          <table:table-cell table:style-name="ce316" table:formula="of:=[.B90]" office:value-type="float" office:value="3139" calcext:value-type="float">
            <text:p><text:s/>3,139.00 </text:p>
          </table:table-cell>
          <table:table-cell table:number-columns-repeated="16382"/>
        </table:table-row>
        <table:table-row table:style-name="ro1">
          <table:table-cell table:style-name="ce296" office:value-type="string" calcext:value-type="string">
            <text:p>Gastos de venta</text:p>
          </table:table-cell>
          <table:table-cell table:style-name="ce317" table:formula="of:=[.B84]" office:value-type="float" office:value="3139" calcext:value-type="float">
            <text:p><text:s/>3,139.00 </text:p>
          </table:table-cell>
          <table:table-cell table:number-columns-repeated="16382"/>
        </table:table-row>
        <table:table-row table:style-name="ro1">
          <table:table-cell table:style-name="ce295" office:value-type="string" calcext:value-type="string">
            <text:p>II. GASTOS ADMINISTRATIVOS</text:p>
          </table:table-cell>
          <table:table-cell table:style-name="ce316" table:formula="of:=SUM([.B92:.B93])" office:value-type="float" office:value="1848" calcext:value-type="float">
            <text:p><text:s/>1,848.00 </text:p>
          </table:table-cell>
          <table:table-cell table:number-columns-repeated="5"/>
          <table:table-cell table:style-name="ce633" table:number-columns-repeated="2"/>
          <table:table-cell table:number-columns-repeated="16375"/>
        </table:table-row>
        <table:table-row table:style-name="ro1">
          <table:table-cell table:style-name="ce296" office:value-type="string" calcext:value-type="string">
            <text:p>Mano de obra Administrativa</text:p>
          </table:table-cell>
          <table:table-cell table:style-name="ce317" table:formula="of:=[$REMUNERACION.F12]" office:value-type="float" office:value="1728" calcext:value-type="float">
            <text:p><text:s/>1,728.00 </text:p>
          </table:table-cell>
          <table:table-cell table:number-columns-repeated="4"/>
          <table:table-cell table:style-name="ce633" table:formula="of:=+[.I72]+[.B84]+[.B94]" office:value-type="float" office:value="53533.0823105033" calcext:value-type="float">
            <text:p><text:s/>53,533.08 </text:p>
          </table:table-cell>
          <table:table-cell table:number-columns-repeated="16377"/>
        </table:table-row>
        <table:table-row table:style-name="ro1">
          <table:table-cell table:style-name="ce296" office:value-type="string" calcext:value-type="string">
            <text:p>Utiles de Oficina </text:p>
          </table:table-cell>
          <table:table-cell table:style-name="ce317" table:formula="of:=[.E12]" office:value-type="float" office:value="120" calcext:value-type="float">
            <text:p><text:s/>120.00 </text:p>
          </table:table-cell>
          <table:table-cell table:number-columns-repeated="16382"/>
        </table:table-row>
        <table:table-row table:style-name="ro1">
          <table:table-cell table:style-name="ce300" office:value-type="string" calcext:value-type="string">
            <text:p>TOTAL GASTOS DE OPERACIÓN</text:p>
          </table:table-cell>
          <table:table-cell table:style-name="ce607" table:formula="of:=[.B89]+[.B91]" office:value-type="float" office:value="4987" calcext:value-type="float">
            <text:p><text:s/>4,987.00 </text:p>
          </table:table-cell>
          <table:table-cell table:number-columns-repeated="6"/>
          <table:table-cell table:style-name="ce633"/>
          <table:table-cell table:number-columns-repeated="16375"/>
        </table:table-row>
        <table:table-row table:style-name="ro1">
          <table:table-cell table:number-columns-repeated="16384"/>
        </table:table-row>
        <table:table-row table:style-name="ro1">
          <table:table-cell/>
          <table:table-cell table:style-name="ce575" table:number-columns-repeated="3"/>
          <table:table-cell table:number-columns-repeated="16380"/>
        </table:table-row>
        <table:table-row table:style-name="ro1">
          <table:table-cell/>
          <table:table-cell table:style-name="ce587" table:number-columns-repeated="3"/>
          <table:table-cell table:number-columns-repeated="16380"/>
        </table:table-row>
        <table:table-row table:style-name="ro1">
          <table:table-cell/>
          <table:table-cell table:style-name="ce608" table:number-columns-repeated="3"/>
          <table:table-cell table:number-columns-repeated="16380"/>
        </table:table-row>
        <table:table-row table:style-name="ro1">
          <table:table-cell/>
          <table:table-cell table:style-name="ce575" table:number-columns-repeated="3"/>
          <table:table-cell table:number-columns-repeated="16380"/>
        </table:table-row>
        <table:table-row table:style-name="ro1" table:number-rows-repeated="2">
          <table:table-cell/>
          <table:table-cell table:style-name="ce608" table:number-columns-repeated="2"/>
          <table:table-cell table:style-name="ce333"/>
          <table:table-cell table:number-columns-repeated="16380"/>
        </table:table-row>
        <table:table-row table:style-name="ro1">
          <table:table-cell/>
          <table:table-cell table:style-name="ce575" table:number-columns-repeated="3"/>
          <table:table-cell table:number-columns-repeated="16380"/>
        </table:table-row>
        <table:table-row table:style-name="ro1">
          <table:table-cell table:style-name="ce248"/>
          <table:table-cell table:style-name="ce609" table:number-columns-repeated="3"/>
          <table:table-cell table:number-columns-repeated="16380"/>
        </table:table-row>
        <table:table-row table:style-name="ro33">
          <table:table-cell table:style-name="ce248"/>
          <table:table-cell table:style-name="ce587"/>
          <table:table-cell table:style-name="ce609" table:number-columns-repeated="2"/>
          <table:table-cell table:number-columns-repeated="16380"/>
        </table:table-row>
        <table:table-row table:style-name="ro1" table:number-rows-repeated="7">
          <table:table-cell table:number-columns-repeated="16384"/>
        </table:table-row>
        <table:table-row table:style-name="ro1">
          <table:table-cell table:style-name="ce594" table:formula="of:=#REF!" office:value-type="string" office:string-value="" calcext:value-type="error">
            <text:p>#¡REF!</text:p>
          </table:table-cell>
          <table:table-cell table:style-name="ce287" table:number-columns-repeated="6"/>
          <table:table-cell/>
          <table:table-cell table:style-name="ce641"/>
          <table:table-cell table:number-columns-repeated="16375"/>
        </table:table-row>
        <table:table-row table:style-name="ro1" table:number-rows-repeated="11">
          <table:table-cell table:style-name="ce248"/>
          <table:table-cell table:number-columns-repeated="16383"/>
        </table:table-row>
        <table:table-row table:style-name="ro1" table:number-rows-repeated="1048452">
          <table:table-cell table:number-columns-repeated="16384"/>
        </table:table-row>
        <table:table-row table:style-name="ro1">
          <table:table-cell table:number-columns-repeated="16384"/>
        </table:table-row>
        <table:named-expressions>
          <table:named-range table:name="_xlnm.Print_Area" table:base-cell-address="$POBLACION.$A$1" table:cell-range-address="$'COSTO PROD Y OPER'.$A$33:.$N$94" table:range-usable-as="print-range"/>
        </table:named-expressions>
      </table:table>
      <table:table table:name="DEPRECIAC " table:style-name="ta16" table:print-ranges="'DEPRECIAC '.A4:'DEPRECIAC '.H16">
        <table:table-column table:style-name="co93" table:default-cell-style-name="ce364"/>
        <table:table-column table:style-name="co94" table:default-cell-style-name="ce364"/>
        <table:table-column table:style-name="co74" table:number-columns-repeated="5" table:default-cell-style-name="ce364"/>
        <table:table-column table:style-name="co95" table:default-cell-style-name="ce364"/>
        <table:table-column table:style-name="co96" table:default-cell-style-name="ce364"/>
        <table:table-column table:style-name="co96" table:number-columns-repeated="16375" table:default-cell-style-name="Default"/>
        <table:table-row table:style-name="ro1" table:number-rows-repeated="3">
          <table:table-cell table:style-name="Default" table:number-columns-repeated="9"/>
          <table:table-cell table:number-columns-repeated="16375"/>
        </table:table-row>
        <table:table-row table:style-name="ro1">
          <table:table-cell table:style-name="ce644" office:value-type="string" calcext:value-type="string" table:number-columns-spanned="8" table:number-rows-spanned="1">
            <text:p>DEPRECIACION DEL ACTIVO FIJO TANGIBLE <text:s/>Y AMORTIZACION INTANGIBLES</text:p>
          </table:table-cell>
          <table:covered-table-cell table:number-columns-repeated="7" table:style-name="ce644"/>
          <table:table-cell table:style-name="Default"/>
          <table:table-cell table:number-columns-repeated="16375"/>
        </table:table-row>
        <table:table-row table:style-name="ro7">
          <table:table-cell table:style-name="ce590" office:value-type="string" calcext:value-type="string" table:number-columns-spanned="1" table:number-rows-spanned="2">
            <text:p>CONCEPTO</text:p>
          </table:table-cell>
          <table:table-cell table:style-name="ce590" office:value-type="string" calcext:value-type="string" table:number-columns-spanned="1" table:number-rows-spanned="2">
            <text:p>d</text:p>
          </table:table-cell>
          <table:table-cell table:style-name="ce590" office:value-type="string" calcext:value-type="string" table:number-columns-spanned="5" table:number-rows-spanned="1">
            <text:p>DEPRECIACIÓN (AÑOS)</text:p>
          </table:table-cell>
          <table:covered-table-cell table:number-columns-repeated="3" table:style-name="ce652"/>
          <table:covered-table-cell table:style-name="ce653"/>
          <table:table-cell table:style-name="ce226" office:value-type="string" calcext:value-type="string" table:number-columns-spanned="1" table:number-rows-spanned="2">
            <text:p>VALOR RESIDUAL</text:p>
          </table:table-cell>
          <table:table-cell table:style-name="Default"/>
          <table:table-cell table:number-columns-repeated="16375"/>
        </table:table-row>
        <table:table-row table:style-name="ro1">
          <table:covered-table-cell table:number-columns-repeated="2" table:style-name="ce590"/>
          <table:table-cell table:style-name="ce590" office:value-type="float" office:value="1" calcext:value-type="float">
            <text:p>1</text:p>
          </table:table-cell>
          <table:table-cell table:style-name="ce590" office:value-type="float" office:value="2" calcext:value-type="float">
            <text:p>2</text:p>
          </table:table-cell>
          <table:table-cell table:style-name="ce590" office:value-type="float" office:value="3" calcext:value-type="float">
            <text:p>3</text:p>
          </table:table-cell>
          <table:table-cell table:style-name="ce590" office:value-type="float" office:value="4" calcext:value-type="float">
            <text:p>4</text:p>
          </table:table-cell>
          <table:table-cell table:style-name="ce590" office:value-type="float" office:value="5" calcext:value-type="float">
            <text:p>5</text:p>
          </table:table-cell>
          <table:covered-table-cell table:style-name="ce226"/>
          <table:table-cell table:style-name="Default"/>
          <table:table-cell table:number-columns-repeated="16375"/>
        </table:table-row>
        <table:table-row table:style-name="ro1">
          <table:table-cell table:style-name="ce645" office:value-type="string" calcext:value-type="string">
            <text:p>I. ACTIVO NO DEPRECIADO</text:p>
          </table:table-cell>
          <table:table-cell table:style-name="ce648" table:number-columns-repeated="6"/>
          <table:table-cell table:style-name="ce363"/>
          <table:table-cell table:style-name="Default"/>
          <table:table-cell table:number-columns-repeated="16375"/>
        </table:table-row>
        <table:table-row table:style-name="ro1">
          <table:table-cell table:style-name="ce646" office:value-type="string" calcext:value-type="string">
            <text:p>I.1.1. TERRENOS</text:p>
          </table:table-cell>
          <table:table-cell table:style-name="ce363" office:value-type="float" office:value="0" calcext:value-type="float">
            <text:p>0</text:p>
          </table:table-cell>
          <table:table-cell table:number-columns-repeated="5" table:style-name="ce650" office:value-type="float" office:value="0" calcext:value-type="float">
            <text:p><text:s/>- <text:s text:c="2"/></text:p>
          </table:table-cell>
          <table:table-cell table:style-name="ce650" table:formula="of:=[$'TERREN Y OBR CIV'.F5]" office:value-type="float" office:value="0" calcext:value-type="float">
            <text:p><text:s/>- <text:s text:c="2"/></text:p>
          </table:table-cell>
          <table:table-cell table:style-name="Default"/>
          <table:table-cell table:number-columns-repeated="16375"/>
        </table:table-row>
        <table:table-row table:style-name="ro1">
          <table:table-cell table:style-name="ce645" office:value-type="string" calcext:value-type="string">
            <text:p>II. DEPRECIACIÓN DEL ACTIVO FIJO TANGIBLE</text:p>
          </table:table-cell>
          <table:table-cell table:style-name="ce363"/>
          <table:table-cell table:style-name="ce520" table:formula="of:=SUM([.C10:.C13])" office:value-type="float" office:value="5651.86440677966" calcext:value-type="float">
            <text:p><text:s/>5,651.86 </text:p>
          </table:table-cell>
          <table:table-cell table:style-name="ce520" table:formula="of:=SUM([.D10:.D13])" office:value-type="float" office:value="5651.86440677966" calcext:value-type="float">
            <text:p><text:s/>5,651.86 </text:p>
          </table:table-cell>
          <table:table-cell table:style-name="ce520" table:formula="of:=SUM([.E10:.E13])" office:value-type="float" office:value="5651.86440677966" calcext:value-type="float">
            <text:p><text:s/>5,651.86 </text:p>
          </table:table-cell>
          <table:table-cell table:style-name="ce520" table:formula="of:=SUM([.F10:.F13])" office:value-type="float" office:value="5651.86440677966" calcext:value-type="float">
            <text:p><text:s/>5,651.86 </text:p>
          </table:table-cell>
          <table:table-cell table:style-name="ce520" table:formula="of:=SUM([.G10:.G13])" office:value-type="float" office:value="5651.86440677966" calcext:value-type="float">
            <text:p><text:s/>5,651.86 </text:p>
          </table:table-cell>
          <table:table-cell table:style-name="ce520" table:formula="of:=SUM([.H10:.H13])" office:value-type="float" office:value="69416.6779661017" calcext:value-type="float">
            <text:p><text:s/>69,416.68 </text:p>
          </table:table-cell>
          <table:table-cell table:style-name="Default"/>
          <table:table-cell table:number-columns-repeated="16375"/>
        </table:table-row>
        <table:table-row table:style-name="ro1">
          <table:table-cell table:style-name="ce363" office:value-type="string" calcext:value-type="string">
            <text:p><text:s text:c="6"/>I.1.2. OBRAS CIVILES</text:p>
          </table:table-cell>
          <table:table-cell table:style-name="ce363" office:value-type="float" office:value="0.05" calcext:value-type="float">
            <text:p>0.05</text:p>
          </table:table-cell>
          <table:table-cell table:style-name="ce650" table:formula="of:=([$'TERREN Y OBR CIV'.G36]/1.18)*[.B10]" office:value-type="float" office:value="2625.76271186441" calcext:value-type="float">
            <text:p><text:s/>2,625.76 </text:p>
          </table:table-cell>
          <table:table-cell table:style-name="ce650" table:formula="of:=[.C10]" office:value-type="float" office:value="2625.76271186441" calcext:value-type="float">
            <text:p><text:s/>2,625.76 </text:p>
          </table:table-cell>
          <table:table-cell table:style-name="ce650" table:formula="of:=[.D10]" office:value-type="float" office:value="2625.76271186441" calcext:value-type="float">
            <text:p><text:s/>2,625.76 </text:p>
          </table:table-cell>
          <table:table-cell table:style-name="ce650" table:formula="of:=[.E10]" office:value-type="float" office:value="2625.76271186441" calcext:value-type="float">
            <text:p><text:s/>2,625.76 </text:p>
          </table:table-cell>
          <table:table-cell table:style-name="ce650" table:formula="of:=[.F10]" office:value-type="float" office:value="2625.76271186441" calcext:value-type="float">
            <text:p><text:s/>2,625.76 </text:p>
          </table:table-cell>
          <table:table-cell table:style-name="ce650" table:formula="of:=(([$'TERREN Y OBR CIV'.G36])-[.G10]*5)" office:value-type="float" office:value="48839.186440678" calcext:value-type="float">
            <text:p><text:s/>48,839.19 </text:p>
          </table:table-cell>
          <table:table-cell table:style-name="Default"/>
          <table:table-cell table:number-columns-repeated="16375"/>
        </table:table-row>
        <table:table-row table:style-name="ro1">
          <table:table-cell table:style-name="ce363" office:value-type="string" calcext:value-type="string">
            <text:p><text:s text:c="6"/>I.1.3. MAQUINARIA Y EQUIPO</text:p>
          </table:table-cell>
          <table:table-cell table:style-name="ce363" office:value-type="float" office:value="0.1" calcext:value-type="float">
            <text:p>0.1</text:p>
          </table:table-cell>
          <table:table-cell table:style-name="ce650" table:formula="of:=(([$INVERSION.F9])/1.18)*[.B11]" office:value-type="float" office:value="2576.94915254237" calcext:value-type="float">
            <text:p><text:s/>2,576.95 </text:p>
          </table:table-cell>
          <table:table-cell table:style-name="ce650" table:formula="of:=[.C11]" office:value-type="float" office:value="2576.94915254237" calcext:value-type="float">
            <text:p><text:s/>2,576.95 </text:p>
          </table:table-cell>
          <table:table-cell table:style-name="ce650" table:formula="of:=[.D11]" office:value-type="float" office:value="2576.94915254237" calcext:value-type="float">
            <text:p><text:s/>2,576.95 </text:p>
          </table:table-cell>
          <table:table-cell table:style-name="ce650" table:formula="of:=[.E11]" office:value-type="float" office:value="2576.94915254237" calcext:value-type="float">
            <text:p><text:s/>2,576.95 </text:p>
          </table:table-cell>
          <table:table-cell table:style-name="ce650" table:formula="of:=[.F11]" office:value-type="float" office:value="2576.94915254237" calcext:value-type="float">
            <text:p><text:s/>2,576.95 </text:p>
          </table:table-cell>
          <table:table-cell table:style-name="ce650" table:formula="of:=(([$INVERSION.F9])-[.G11]*5)" office:value-type="float" office:value="17523.2542372881" calcext:value-type="float">
            <text:p><text:s/>17,523.25 </text:p>
          </table:table-cell>
          <table:table-cell table:style-name="Default"/>
          <table:table-cell table:number-columns-repeated="16375"/>
        </table:table-row>
        <table:table-row table:style-name="ro1" table:visibility="collapse">
          <table:table-cell table:style-name="ce363" office:value-type="string" calcext:value-type="string">
            <text:p><text:s text:c="6"/>I.1.4. VEHICULOS</text:p>
          </table:table-cell>
          <table:table-cell table:style-name="ce363" office:value-type="float" office:value="0.1" calcext:value-type="float">
            <text:p>0.1</text:p>
          </table:table-cell>
          <table:table-cell table:style-name="ce650" table:formula="of:=(([$INVERSION.F10]/1.18))*[.B12]" office:value-type="float" office:value="0" calcext:value-type="float">
            <text:p><text:s/>- <text:s text:c="2"/></text:p>
          </table:table-cell>
          <table:table-cell table:style-name="ce650" table:formula="of:=[.C12]" office:value-type="float" office:value="0" calcext:value-type="float">
            <text:p><text:s/>- <text:s text:c="2"/></text:p>
          </table:table-cell>
          <table:table-cell table:style-name="ce650" table:formula="of:=[.D12]" office:value-type="float" office:value="0" calcext:value-type="float">
            <text:p><text:s/>- <text:s text:c="2"/></text:p>
          </table:table-cell>
          <table:table-cell table:style-name="ce650" table:formula="of:=[.E12]" office:value-type="float" office:value="0" calcext:value-type="float">
            <text:p><text:s/>- <text:s text:c="2"/></text:p>
          </table:table-cell>
          <table:table-cell table:style-name="ce650" table:formula="of:=[.F12]" office:value-type="float" office:value="0" calcext:value-type="float">
            <text:p><text:s/>- <text:s text:c="2"/></text:p>
          </table:table-cell>
          <table:table-cell table:style-name="ce650" table:formula="of:=(([$INVERSION.F10])-[.G12]*5)" office:value-type="float" office:value="0" calcext:value-type="float">
            <text:p><text:s/>- <text:s text:c="2"/></text:p>
          </table:table-cell>
          <table:table-cell table:style-name="Default"/>
          <table:table-cell table:number-columns-repeated="16375"/>
        </table:table-row>
        <table:table-row table:style-name="ro1">
          <table:table-cell table:style-name="ce363" office:value-type="string" calcext:value-type="string">
            <text:p><text:s text:c="6"/>I.1.5. MUEBLES Y ENSERES</text:p>
          </table:table-cell>
          <table:table-cell table:style-name="ce363" office:value-type="float" office:value="0.1" calcext:value-type="float">
            <text:p>0.1</text:p>
          </table:table-cell>
          <table:table-cell table:style-name="ce650" table:formula="of:=(([$INVERSION.F11])/1.18)*[.B13]" office:value-type="float" office:value="449.152542372881" calcext:value-type="float">
            <text:p><text:s/>449.15 </text:p>
          </table:table-cell>
          <table:table-cell table:style-name="ce650" table:formula="of:=[.C13]" office:value-type="float" office:value="449.152542372881" calcext:value-type="float">
            <text:p><text:s/>449.15 </text:p>
          </table:table-cell>
          <table:table-cell table:style-name="ce650" table:formula="of:=[.D13]" office:value-type="float" office:value="449.152542372881" calcext:value-type="float">
            <text:p><text:s/>449.15 </text:p>
          </table:table-cell>
          <table:table-cell table:style-name="ce650" table:formula="of:=[.E13]" office:value-type="float" office:value="449.152542372881" calcext:value-type="float">
            <text:p><text:s/>449.15 </text:p>
          </table:table-cell>
          <table:table-cell table:style-name="ce650" table:formula="of:=[.F13]" office:value-type="float" office:value="449.152542372881" calcext:value-type="float">
            <text:p><text:s/>449.15 </text:p>
          </table:table-cell>
          <table:table-cell table:style-name="ce650" table:formula="of:=(([$INVERSION.F11])-[.G13]*5)" office:value-type="float" office:value="3054.23728813559" calcext:value-type="float">
            <text:p><text:s/>3,054.24 </text:p>
          </table:table-cell>
          <table:table-cell table:style-name="Default"/>
          <table:table-cell table:number-columns-repeated="16375"/>
        </table:table-row>
        <table:table-row table:style-name="ro1">
          <table:table-cell table:style-name="ce645" office:value-type="string" calcext:value-type="string">
            <text:p>III. AMORTIZACIÓN INTANGIBLES</text:p>
          </table:table-cell>
          <table:table-cell table:style-name="ce363"/>
          <table:table-cell table:style-name="ce520" table:formula="of:=[.C15]" office:value-type="float" office:value="3650" calcext:value-type="float">
            <text:p><text:s/>3,650.00 </text:p>
          </table:table-cell>
          <table:table-cell table:style-name="ce520" table:formula="of:=[.D15]" office:value-type="float" office:value="3650" calcext:value-type="float">
            <text:p><text:s/>3,650.00 </text:p>
          </table:table-cell>
          <table:table-cell table:style-name="ce520" table:formula="of:=[.E15]" office:value-type="float" office:value="3650" calcext:value-type="float">
            <text:p><text:s/>3,650.00 </text:p>
          </table:table-cell>
          <table:table-cell table:style-name="ce520" table:formula="of:=[.F15]" office:value-type="float" office:value="3650" calcext:value-type="float">
            <text:p><text:s/>3,650.00 </text:p>
          </table:table-cell>
          <table:table-cell table:style-name="ce520" table:formula="of:=[.G15]" office:value-type="float" office:value="3650" calcext:value-type="float">
            <text:p><text:s/>3,650.00 </text:p>
          </table:table-cell>
          <table:table-cell table:style-name="ce520"/>
          <table:table-cell table:style-name="Default"/>
          <table:table-cell table:number-columns-repeated="16375"/>
        </table:table-row>
        <table:table-row table:style-name="ro1">
          <table:table-cell table:style-name="ce646" office:value-type="string" calcext:value-type="string">
            <text:p>II.1.INVERSIÓN FIJA INTANGIBLE</text:p>
          </table:table-cell>
          <table:table-cell table:style-name="ce649" office:value-type="float" office:value="0.2" calcext:value-type="float">
            <text:p>0.2</text:p>
          </table:table-cell>
          <table:table-cell table:style-name="ce650" table:formula="of:=[$INVERSION.F12]*[.B15]" office:value-type="float" office:value="3650" calcext:value-type="float">
            <text:p><text:s/>3,650.00 </text:p>
          </table:table-cell>
          <table:table-cell table:style-name="ce650" table:formula="of:=[.C15]" office:value-type="float" office:value="3650" calcext:value-type="float">
            <text:p><text:s/>3,650.00 </text:p>
          </table:table-cell>
          <table:table-cell table:style-name="ce650" table:formula="of:=[.D15]" office:value-type="float" office:value="3650" calcext:value-type="float">
            <text:p><text:s/>3,650.00 </text:p>
          </table:table-cell>
          <table:table-cell table:style-name="ce650" table:formula="of:=[.E15]" office:value-type="float" office:value="3650" calcext:value-type="float">
            <text:p><text:s/>3,650.00 </text:p>
          </table:table-cell>
          <table:table-cell table:style-name="ce650" table:formula="of:=[.F15]" office:value-type="float" office:value="3650" calcext:value-type="float">
            <text:p><text:s/>3,650.00 </text:p>
          </table:table-cell>
          <table:table-cell table:style-name="ce650" table:formula="of:=[$INVERSION.F12]-[.G15]*5" office:value-type="float" office:value="0" calcext:value-type="float">
            <text:p><text:s/>- <text:s text:c="2"/></text:p>
          </table:table-cell>
          <table:table-cell table:style-name="Default"/>
          <table:table-cell table:number-columns-repeated="16375"/>
        </table:table-row>
        <table:table-row table:style-name="ro1">
          <table:table-cell table:style-name="ce647" office:value-type="string" calcext:value-type="string">
            <text:p>TOTAL ( II + III)</text:p>
          </table:table-cell>
          <table:table-cell table:style-name="ce647"/>
          <table:table-cell table:style-name="ce651" table:formula="of:=[.C14]+[.C9]" office:value-type="float" office:value="9301.86440677966" calcext:value-type="float">
            <text:p><text:s/>9,301.86 </text:p>
          </table:table-cell>
          <table:table-cell table:style-name="ce651" table:formula="of:=[.D14]+[.D9]" office:value-type="float" office:value="9301.86440677966" calcext:value-type="float">
            <text:p><text:s/>9,301.86 </text:p>
          </table:table-cell>
          <table:table-cell table:style-name="ce651" table:formula="of:=[.E14]+[.E9]" office:value-type="float" office:value="9301.86440677966" calcext:value-type="float">
            <text:p><text:s/>9,301.86 </text:p>
          </table:table-cell>
          <table:table-cell table:style-name="ce651" table:formula="of:=[.F14]+[.F9]" office:value-type="float" office:value="9301.86440677966" calcext:value-type="float">
            <text:p><text:s/>9,301.86 </text:p>
          </table:table-cell>
          <table:table-cell table:style-name="ce651" table:formula="of:=[.G14]+[.G9]" office:value-type="float" office:value="9301.86440677966" calcext:value-type="float">
            <text:p><text:s/>9,301.86 </text:p>
          </table:table-cell>
          <table:table-cell table:style-name="ce651" table:formula="of:=[.H8]+[.H9]+[.H14]" office:value-type="float" office:value="69416.6779661017" calcext:value-type="float">
            <text:p><text:s/>69,416.68 </text:p>
          </table:table-cell>
          <table:table-cell table:style-name="Default"/>
          <table:table-cell table:number-columns-repeated="16375"/>
        </table:table-row>
        <table:table-row table:style-name="ro1">
          <table:table-cell table:style-name="Default" table:number-columns-repeated="9"/>
          <table:table-cell table:number-columns-repeated="16375"/>
        </table:table-row>
        <table:table-row table:style-name="ro1" table:number-rows-repeated="6">
          <table:table-cell table:number-columns-repeated="16384"/>
        </table:table-row>
        <table:table-row table:style-name="ro1">
          <table:table-cell table:number-columns-repeated="6"/>
          <table:table-cell table:style-name="ce654"/>
          <table:table-cell table:number-columns-repeated="16377"/>
        </table:table-row>
        <table:table-row table:style-name="ro1">
          <table:table-cell table:number-columns-repeated="16384"/>
        </table:table-row>
        <table:table-row table:style-name="ro1" table:number-rows-repeated="10">
          <table:table-cell table:number-columns-repeated="16384"/>
        </table:table-row>
        <table:table-row table:style-name="ro1">
          <table:table-cell table:number-columns-repeated="16384"/>
        </table:table-row>
        <table:named-expressions>
          <table:named-range table:name="_xlnm.Print_Area" table:base-cell-address="$POBLACION.$A$1" table:cell-range-address="$'DEPRECIAC '.$A$4:.$H$16" table:range-usable-as="print-range"/>
        </table:named-expressions>
      </table:table>
      <table:table table:name="COSTOS TOTALES" table:style-name="ta17" table:print-ranges="'COSTOS TOTALES'.A3:'COSTOS TOTALES'.F29">
        <table:table-column table:style-name="co97" table:default-cell-style-name="ce364"/>
        <table:table-column table:style-name="co74" table:default-cell-style-name="ce520"/>
        <table:table-column table:style-name="co36" table:number-columns-repeated="4" table:default-cell-style-name="ce364"/>
        <table:table-column table:style-name="co96" table:default-cell-style-name="ce364"/>
        <table:table-column table:style-name="co96" table:number-columns-repeated="16377" table:default-cell-style-name="Default"/>
        <table:table-row table:style-name="ro1" table:number-rows-repeated="2">
          <table:table-cell table:style-name="Default" table:number-columns-repeated="7"/>
          <table:table-cell table:number-columns-repeated="16377"/>
        </table:table-row>
        <table:table-row table:style-name="ro1">
          <table:table-cell table:style-name="ce655" office:value-type="string" calcext:value-type="string" table:number-columns-spanned="6" table:number-rows-spanned="1">
            <text:p>PRESUPUESTO DE EGRESOS (OPERACION)</text:p>
          </table:table-cell>
          <table:covered-table-cell table:number-columns-repeated="5" table:style-name="ce655"/>
          <table:table-cell table:style-name="Default"/>
          <table:table-cell table:number-columns-repeated="16377"/>
        </table:table-row>
        <table:table-row table:style-name="ro1">
          <table:table-cell table:style-name="ce590" office:value-type="string" calcext:value-type="string" table:number-columns-spanned="1" table:number-rows-spanned="2">
            <text:p>CONCEPTO</text:p>
          </table:table-cell>
          <table:table-cell table:style-name="ce590" office:value-type="string" calcext:value-type="string" table:number-columns-spanned="5" table:number-rows-spanned="1">
            <text:p>AÑOS</text:p>
          </table:table-cell>
          <table:covered-table-cell table:number-columns-repeated="4" table:style-name="ce590"/>
          <table:table-cell table:style-name="Default"/>
          <table:table-cell table:number-columns-repeated="16377"/>
        </table:table-row>
        <table:table-row table:style-name="ro1">
          <table:covered-table-cell table:style-name="ce590"/>
          <table:table-cell table:style-name="ce659" office:value-type="float" office:value="1" calcext:value-type="float">
            <text:p>1</text:p>
          </table:table-cell>
          <table:table-cell table:style-name="ce659" office:value-type="float" office:value="2" calcext:value-type="float">
            <text:p>2</text:p>
          </table:table-cell>
          <table:table-cell table:style-name="ce659" office:value-type="float" office:value="3" calcext:value-type="float">
            <text:p>3</text:p>
          </table:table-cell>
          <table:table-cell table:style-name="ce659" office:value-type="float" office:value="4" calcext:value-type="float">
            <text:p>4</text:p>
          </table:table-cell>
          <table:table-cell table:style-name="ce659" office:value-type="float" office:value="5" calcext:value-type="float">
            <text:p>5</text:p>
          </table:table-cell>
          <table:table-cell table:style-name="Default"/>
          <table:table-cell table:number-columns-repeated="16377"/>
        </table:table-row>
        <table:table-row table:style-name="ro1">
          <table:table-cell table:style-name="ce645" office:value-type="string" calcext:value-type="string">
            <text:p>I. COSTOS DE PRODUCCIÒN</text:p>
          </table:table-cell>
          <table:table-cell table:formula="of:=[.B7]+[.B10]" office:value-type="float" office:value="45407.0823105033" calcext:value-type="float">
            <text:p><text:s/>45,407.08 </text:p>
          </table:table-cell>
          <table:table-cell table:style-name="ce520" table:formula="of:=[.C7]+[.C10]" office:value-type="float" office:value="116426.673626667" calcext:value-type="float">
            <text:p><text:s/>116,426.67 </text:p>
          </table:table-cell>
          <table:table-cell table:style-name="ce520" table:formula="of:=[.D7]+[.D10]" office:value-type="float" office:value="116426.673626667" calcext:value-type="float">
            <text:p><text:s/>116,426.67 </text:p>
          </table:table-cell>
          <table:table-cell table:style-name="ce520" table:formula="of:=[.E7]+[.E10]" office:value-type="float" office:value="116426.673626667" calcext:value-type="float">
            <text:p><text:s/>116,426.67 </text:p>
          </table:table-cell>
          <table:table-cell table:style-name="ce520" table:formula="of:=[.F7]+[.F10]" office:value-type="float" office:value="116426.673626667" calcext:value-type="float">
            <text:p><text:s/>116,426.67 </text:p>
          </table:table-cell>
          <table:table-cell table:style-name="Default"/>
          <table:table-cell table:number-columns-repeated="16377"/>
        </table:table-row>
        <table:table-row table:style-name="ro1">
          <table:table-cell table:style-name="ce645" office:value-type="string" calcext:value-type="string">
            <text:p>I.1. COSTOS DIRECTOS</text:p>
          </table:table-cell>
          <table:table-cell table:formula="of:=SUM([.B8:.B9])" office:value-type="float" office:value="41751.7741841356" calcext:value-type="float">
            <text:p><text:s/>41,751.77 </text:p>
          </table:table-cell>
          <table:table-cell table:style-name="ce520" table:formula="of:=[.C8]+[.C9]" office:value-type="float" office:value="111601.48336" calcext:value-type="float">
            <text:p><text:s/>111,601.48 </text:p>
          </table:table-cell>
          <table:table-cell table:style-name="ce520" table:formula="of:=[.D8]+[.D9]" office:value-type="float" office:value="111601.48336" calcext:value-type="float">
            <text:p><text:s/>111,601.48 </text:p>
          </table:table-cell>
          <table:table-cell table:style-name="ce520" table:formula="of:=[.E8]+[.E9]" office:value-type="float" office:value="111601.48336" calcext:value-type="float">
            <text:p><text:s/>111,601.48 </text:p>
          </table:table-cell>
          <table:table-cell table:style-name="ce520" table:formula="of:=[.F8]+[.F9]" office:value-type="float" office:value="111601.48336" calcext:value-type="float">
            <text:p><text:s/>111,601.48 </text:p>
          </table:table-cell>
          <table:table-cell table:style-name="Default"/>
          <table:table-cell table:number-columns-repeated="16377"/>
        </table:table-row>
        <table:table-row table:style-name="ro1">
          <table:table-cell table:style-name="ce363" office:value-type="string" calcext:value-type="string">
            <text:p>I.1.1. MATERIALES DIRECTOS</text:p>
          </table:table-cell>
          <table:table-cell table:style-name="ce650" table:formula="of:=[$'COSTO PROD Y OPER'.I64]" office:value-type="float" office:value="28791.7741841356" calcext:value-type="float">
            <text:p><text:s/>28,791.77 </text:p>
          </table:table-cell>
          <table:table-cell table:style-name="ce650" table:formula="of:=[$'COSTO PROD Y OPER'.J64]" office:value-type="float" office:value="98641.48336" calcext:value-type="float">
            <text:p><text:s/>98,641.48 </text:p>
          </table:table-cell>
          <table:table-cell table:style-name="ce650" table:formula="of:=[$'COSTO PROD Y OPER'.K64]" office:value-type="float" office:value="98641.48336" calcext:value-type="float">
            <text:p><text:s/>98,641.48 </text:p>
          </table:table-cell>
          <table:table-cell table:style-name="ce650" table:formula="of:=[$'COSTO PROD Y OPER'.L64]" office:value-type="float" office:value="98641.48336" calcext:value-type="float">
            <text:p><text:s/>98,641.48 </text:p>
          </table:table-cell>
          <table:table-cell table:style-name="ce650" table:formula="of:=[$'COSTO PROD Y OPER'.M64]" office:value-type="float" office:value="98641.48336" calcext:value-type="float">
            <text:p><text:s/>98,641.48 </text:p>
          </table:table-cell>
          <table:table-cell table:style-name="Default"/>
          <table:table-cell table:number-columns-repeated="16377"/>
        </table:table-row>
        <table:table-row table:style-name="ro1">
          <table:table-cell table:style-name="ce363" office:value-type="string" calcext:value-type="string">
            <text:p>I.1.2. MANO DE OBRA DIRECTA.</text:p>
          </table:table-cell>
          <table:table-cell table:style-name="ce650" table:formula="of:=[$'COSTO PROD Y OPER'.I67]" office:value-type="float" office:value="12960" calcext:value-type="float">
            <text:p><text:s/>12,960.00 </text:p>
          </table:table-cell>
          <table:table-cell table:style-name="ce650" table:formula="of:=[$'COSTO PROD Y OPER'.J67]" office:value-type="float" office:value="12960" calcext:value-type="float">
            <text:p><text:s/>12,960.00 </text:p>
          </table:table-cell>
          <table:table-cell table:style-name="ce650" table:formula="of:=[$'COSTO PROD Y OPER'.K67]" office:value-type="float" office:value="12960" calcext:value-type="float">
            <text:p><text:s/>12,960.00 </text:p>
          </table:table-cell>
          <table:table-cell table:style-name="ce650" table:formula="of:=[$'COSTO PROD Y OPER'.L67]" office:value-type="float" office:value="12960" calcext:value-type="float">
            <text:p><text:s/>12,960.00 </text:p>
          </table:table-cell>
          <table:table-cell table:style-name="ce650" table:formula="of:=[$'COSTO PROD Y OPER'.M67]" office:value-type="float" office:value="12960" calcext:value-type="float">
            <text:p><text:s/>12,960.00 </text:p>
          </table:table-cell>
          <table:table-cell table:style-name="Default"/>
          <table:table-cell table:number-columns-repeated="16377"/>
        </table:table-row>
        <table:table-row table:style-name="ro1">
          <table:table-cell table:style-name="ce645" office:value-type="string" calcext:value-type="string">
            <text:p>I.2. COSTOS INDIRECTOS</text:p>
          </table:table-cell>
          <table:table-cell table:formula="of:=SUM([.B11:.B13])" office:value-type="float" office:value="3655.30812636772" calcext:value-type="float">
            <text:p><text:s/>3,655.31 </text:p>
          </table:table-cell>
          <table:table-cell table:style-name="ce520" table:formula="of:=SUM([.C11:.C13])" office:value-type="float" office:value="4825.19026666667" calcext:value-type="float">
            <text:p><text:s/>4,825.19 </text:p>
          </table:table-cell>
          <table:table-cell table:style-name="ce520" table:formula="of:=SUM([.D11:.D13])" office:value-type="float" office:value="4825.19026666667" calcext:value-type="float">
            <text:p><text:s/>4,825.19 </text:p>
          </table:table-cell>
          <table:table-cell table:style-name="ce520" table:formula="of:=SUM([.E11:.E13])" office:value-type="float" office:value="4825.19026666667" calcext:value-type="float">
            <text:p><text:s/>4,825.19 </text:p>
          </table:table-cell>
          <table:table-cell table:style-name="ce520" table:formula="of:=SUM([.F11:.F13])" office:value-type="float" office:value="4825.19026666667" calcext:value-type="float">
            <text:p><text:s/>4,825.19 </text:p>
          </table:table-cell>
          <table:table-cell table:style-name="Default"/>
          <table:table-cell table:number-columns-repeated="16377"/>
        </table:table-row>
        <table:table-row table:style-name="ro1">
          <table:table-cell table:style-name="ce656" office:value-type="string" calcext:value-type="string">
            <text:p>I.2.1. MATERIALES INDIRECTOS.</text:p>
          </table:table-cell>
          <table:table-cell table:style-name="ce521" table:formula="of:=[$'COSTO PROD Y OPER'.I69]" office:value-type="float" office:value="451.308126367721" calcext:value-type="float">
            <text:p><text:s/>451.31 </text:p>
          </table:table-cell>
          <table:table-cell table:style-name="ce521" table:formula="of:=[$'COSTO PROD Y OPER'.J69]" office:value-type="float" office:value="1621.19026666667" calcext:value-type="float">
            <text:p><text:s/>1,621.19 </text:p>
          </table:table-cell>
          <table:table-cell table:style-name="ce521" table:formula="of:=[$'COSTO PROD Y OPER'.K69]" office:value-type="float" office:value="1621.19026666667" calcext:value-type="float">
            <text:p><text:s/>1,621.19 </text:p>
          </table:table-cell>
          <table:table-cell table:style-name="ce521" table:formula="of:=[$'COSTO PROD Y OPER'.L69]" office:value-type="float" office:value="1621.19026666667" calcext:value-type="float">
            <text:p><text:s/>1,621.19 </text:p>
          </table:table-cell>
          <table:table-cell table:style-name="ce521" table:formula="of:=[$'COSTO PROD Y OPER'.M69]" office:value-type="float" office:value="1621.19026666667" calcext:value-type="float">
            <text:p><text:s/>1,621.19 </text:p>
          </table:table-cell>
          <table:table-cell table:style-name="Default"/>
          <table:table-cell table:number-columns-repeated="16377"/>
        </table:table-row>
        <table:table-row table:style-name="ro1">
          <table:table-cell table:style-name="ce656" office:value-type="string" calcext:value-type="string">
            <text:p>I.2.1. MANO DE OBRA INDIRECTA.</text:p>
          </table:table-cell>
          <table:table-cell table:style-name="ce521" table:formula="of:=[$'COSTO PROD Y OPER'.I70]" office:value-type="float" office:value="1800" calcext:value-type="float">
            <text:p><text:s/>1,800.00 </text:p>
          </table:table-cell>
          <table:table-cell table:style-name="ce521" table:formula="of:=[$'COSTO PROD Y OPER'.J70]" office:value-type="float" office:value="1800" calcext:value-type="float">
            <text:p><text:s/>1,800.00 </text:p>
          </table:table-cell>
          <table:table-cell table:style-name="ce521" table:formula="of:=[$'COSTO PROD Y OPER'.K70]" office:value-type="float" office:value="1800" calcext:value-type="float">
            <text:p><text:s/>1,800.00 </text:p>
          </table:table-cell>
          <table:table-cell table:style-name="ce521" table:formula="of:=[$'COSTO PROD Y OPER'.L70]" office:value-type="float" office:value="1800" calcext:value-type="float">
            <text:p><text:s/>1,800.00 </text:p>
          </table:table-cell>
          <table:table-cell table:style-name="ce521" table:formula="of:=[$'COSTO PROD Y OPER'.M70]" office:value-type="float" office:value="1800" calcext:value-type="float">
            <text:p><text:s/>1,800.00 </text:p>
          </table:table-cell>
          <table:table-cell table:style-name="Default"/>
          <table:table-cell table:number-columns-repeated="16377"/>
        </table:table-row>
        <table:table-row table:style-name="ro1">
          <table:table-cell table:style-name="ce656" office:value-type="string" calcext:value-type="string">
            <text:p>I.2.2 OTROS COSTOS INDIRECTOS</text:p>
          </table:table-cell>
          <table:table-cell table:style-name="ce521" table:formula="of:=[$'COSTO PROD Y OPER'.I71]" office:value-type="float" office:value="1404" calcext:value-type="float">
            <text:p><text:s/>1,404.00 </text:p>
          </table:table-cell>
          <table:table-cell table:style-name="ce650" table:formula="of:=[.B13]" office:value-type="float" office:value="1404" calcext:value-type="float">
            <text:p><text:s/>1,404.00 </text:p>
          </table:table-cell>
          <table:table-cell table:style-name="ce650" table:formula="of:=[.C13]" office:value-type="float" office:value="1404" calcext:value-type="float">
            <text:p><text:s/>1,404.00 </text:p>
          </table:table-cell>
          <table:table-cell table:style-name="ce650" table:formula="of:=[.D13]" office:value-type="float" office:value="1404" calcext:value-type="float">
            <text:p><text:s/>1,404.00 </text:p>
          </table:table-cell>
          <table:table-cell table:style-name="ce650" table:formula="of:=[.E13]" office:value-type="float" office:value="1404" calcext:value-type="float">
            <text:p><text:s/>1,404.00 </text:p>
          </table:table-cell>
          <table:table-cell table:style-name="Default"/>
          <table:table-cell table:number-columns-repeated="16377"/>
        </table:table-row>
        <table:table-row table:style-name="ro1">
          <table:table-cell table:style-name="ce645" office:value-type="string" calcext:value-type="string">
            <text:p>II. GASTOS DE OPERACIÒN</text:p>
          </table:table-cell>
          <table:table-cell table:formula="of:=[.B15]+[.B16]" office:value-type="float" office:value="4987" calcext:value-type="float">
            <text:p><text:s/>4,987.00 </text:p>
          </table:table-cell>
          <table:table-cell table:style-name="ce520" table:formula="of:=[.B14]" office:value-type="float" office:value="4987" calcext:value-type="float">
            <text:p><text:s/>4,987.00 </text:p>
          </table:table-cell>
          <table:table-cell table:style-name="ce520" table:formula="of:=[.C14]" office:value-type="float" office:value="4987" calcext:value-type="float">
            <text:p><text:s/>4,987.00 </text:p>
          </table:table-cell>
          <table:table-cell table:style-name="ce520" table:formula="of:=[.D14]" office:value-type="float" office:value="4987" calcext:value-type="float">
            <text:p><text:s/>4,987.00 </text:p>
          </table:table-cell>
          <table:table-cell table:style-name="ce520" table:formula="of:=[.E14]" office:value-type="float" office:value="4987" calcext:value-type="float">
            <text:p><text:s/>4,987.00 </text:p>
          </table:table-cell>
          <table:table-cell table:style-name="Default"/>
          <table:table-cell table:number-columns-repeated="16377"/>
        </table:table-row>
        <table:table-row table:style-name="ro1">
          <table:table-cell table:style-name="ce363" office:value-type="string" calcext:value-type="string">
            <text:p>II.1. GASTOS DE VENTA</text:p>
          </table:table-cell>
          <table:table-cell table:style-name="ce650" table:formula="of:=[$'COSTO PROD Y OPER'.B89]" office:value-type="float" office:value="3139" calcext:value-type="float">
            <text:p><text:s/>3,139.00 </text:p>
          </table:table-cell>
          <table:table-cell table:style-name="ce650" table:formula="of:=[.B15]" office:value-type="float" office:value="3139" calcext:value-type="float">
            <text:p><text:s/>3,139.00 </text:p>
          </table:table-cell>
          <table:table-cell table:style-name="ce650" table:formula="of:=[.C15]" office:value-type="float" office:value="3139" calcext:value-type="float">
            <text:p><text:s/>3,139.00 </text:p>
          </table:table-cell>
          <table:table-cell table:style-name="ce650" table:formula="of:=[.D15]" office:value-type="float" office:value="3139" calcext:value-type="float">
            <text:p><text:s/>3,139.00 </text:p>
          </table:table-cell>
          <table:table-cell table:style-name="ce650" table:formula="of:=[.E15]" office:value-type="float" office:value="3139" calcext:value-type="float">
            <text:p><text:s/>3,139.00 </text:p>
          </table:table-cell>
          <table:table-cell table:style-name="Default"/>
          <table:table-cell table:number-columns-repeated="16377"/>
        </table:table-row>
        <table:table-row table:style-name="ro1">
          <table:table-cell table:style-name="ce657" office:value-type="string" calcext:value-type="string">
            <text:p>II.2. GASTOS ADMINISTRATIVOS</text:p>
          </table:table-cell>
          <table:table-cell table:style-name="ce660" table:formula="of:=[$'COSTO PROD Y OPER'.B91]" office:value-type="float" office:value="1848" calcext:value-type="float">
            <text:p><text:s/>1,848.00 </text:p>
          </table:table-cell>
          <table:table-cell table:style-name="ce650" table:formula="of:=[.B16]" office:value-type="float" office:value="1848" calcext:value-type="float">
            <text:p><text:s/>1,848.00 </text:p>
          </table:table-cell>
          <table:table-cell table:style-name="ce650" table:formula="of:=[.C16]" office:value-type="float" office:value="1848" calcext:value-type="float">
            <text:p><text:s/>1,848.00 </text:p>
          </table:table-cell>
          <table:table-cell table:style-name="ce650" table:formula="of:=[.D16]" office:value-type="float" office:value="1848" calcext:value-type="float">
            <text:p><text:s/>1,848.00 </text:p>
          </table:table-cell>
          <table:table-cell table:style-name="ce650" table:formula="of:=[.E16]" office:value-type="float" office:value="1848" calcext:value-type="float">
            <text:p><text:s/>1,848.00 </text:p>
          </table:table-cell>
          <table:table-cell table:number-columns-repeated="16378"/>
        </table:table-row>
        <table:table-row table:style-name="ro1">
          <table:table-cell table:style-name="ce645" office:value-type="string" calcext:value-type="string">
            <text:p>III. DEPRECIACIÒN Y AMORTIZACION INTANG.</text:p>
          </table:table-cell>
          <table:table-cell table:formula="of:=[$'DEPRECIAC '.C16]" office:value-type="float" office:value="9301.86440677966" calcext:value-type="float">
            <text:p><text:s/>9,301.86 </text:p>
          </table:table-cell>
          <table:table-cell table:style-name="ce520" table:formula="of:=[$'DEPRECIAC '.D16]" office:value-type="float" office:value="9301.86440677966" calcext:value-type="float">
            <text:p><text:s/>9,301.86 </text:p>
          </table:table-cell>
          <table:table-cell table:style-name="ce520" table:formula="of:=[$'DEPRECIAC '.E16]" office:value-type="float" office:value="9301.86440677966" calcext:value-type="float">
            <text:p><text:s/>9,301.86 </text:p>
          </table:table-cell>
          <table:table-cell table:style-name="ce520" table:formula="of:=[$'DEPRECIAC '.F16]" office:value-type="float" office:value="9301.86440677966" calcext:value-type="float">
            <text:p><text:s/>9,301.86 </text:p>
          </table:table-cell>
          <table:table-cell table:style-name="ce520" table:formula="of:=[$'DEPRECIAC '.G16]" office:value-type="float" office:value="9301.86440677966" calcext:value-type="float">
            <text:p><text:s/>9,301.86 </text:p>
          </table:table-cell>
          <table:table-cell table:number-columns-repeated="16378"/>
        </table:table-row>
        <table:table-row table:style-name="ro1">
          <table:table-cell table:style-name="ce645" office:value-type="string" calcext:value-type="string">
            <text:p>IV. GASTOS FINANCIEROS</text:p>
          </table:table-cell>
          <table:table-cell table:formula="of:=SUM([.B19:.B19])" office:value-type="float" office:value="5388.86178313251" calcext:value-type="float">
            <text:p><text:s/>5,388.86 </text:p>
          </table:table-cell>
          <table:table-cell table:style-name="ce520" table:formula="of:=SUM([.C19:.C19])" office:value-type="float" office:value="0" calcext:value-type="float">
            <text:p><text:s/>- <text:s text:c="2"/></text:p>
          </table:table-cell>
          <table:table-cell table:style-name="ce520" table:formula="of:=SUM([.D19:.D19])" office:value-type="float" office:value="0" calcext:value-type="float">
            <text:p><text:s/>- <text:s text:c="2"/></text:p>
          </table:table-cell>
          <table:table-cell table:style-name="ce520" table:formula="of:=SUM([.E19:.E19])" office:value-type="float" office:value="0" calcext:value-type="float">
            <text:p><text:s/>- <text:s text:c="2"/></text:p>
          </table:table-cell>
          <table:table-cell table:style-name="ce520" table:formula="of:=SUM([.F19:.F19])" office:value-type="float" office:value="0" calcext:value-type="float">
            <text:p><text:s/>- <text:s text:c="2"/></text:p>
          </table:table-cell>
          <table:table-cell table:number-columns-repeated="16378"/>
        </table:table-row>
        <table:table-row table:style-name="ro1">
          <table:table-cell table:style-name="ce656" office:value-type="string" calcext:value-type="string">
            <text:p>PAGO DE PRESTAMO</text:p>
          </table:table-cell>
          <table:table-cell table:style-name="ce650" table:formula="of:=[$FINANCIAMIENT.B53]" office:value-type="float" office:value="5388.86178313251" calcext:value-type="float">
            <text:p><text:s/>5,388.86 </text:p>
          </table:table-cell>
          <table:table-cell table:style-name="ce650" table:formula="of:=[$FINANCIAMIENT.C53]" office:value-type="float" office:value="0" calcext:value-type="float">
            <text:p><text:s/>- <text:s text:c="2"/></text:p>
          </table:table-cell>
          <table:table-cell table:style-name="ce650" table:formula="of:=[$FINANCIAMIENT.D53]" office:value-type="float" office:value="0" calcext:value-type="float">
            <text:p><text:s/>- <text:s text:c="2"/></text:p>
          </table:table-cell>
          <table:table-cell table:style-name="ce650" table:number-columns-repeated="2"/>
          <table:table-cell table:style-name="ce663"/>
          <table:table-cell table:number-columns-repeated="16377"/>
        </table:table-row>
        <table:table-row table:style-name="ro1">
          <table:table-cell table:style-name="ce645" office:value-type="string" calcext:value-type="string">
            <text:p>TOTAL EGRESOS</text:p>
          </table:table-cell>
          <table:table-cell table:formula="of:=[.B18]+[.B17]+[.B14]+[.B6]" office:value-type="float" office:value="65084.8085004154" calcext:value-type="float">
            <text:p><text:s/>65,084.81 </text:p>
          </table:table-cell>
          <table:table-cell table:style-name="ce520" table:formula="of:=[.C18]+[.C17]+[.C14]+[.C6]" office:value-type="float" office:value="130715.538033446" calcext:value-type="float">
            <text:p><text:s/>130,715.54 </text:p>
          </table:table-cell>
          <table:table-cell table:style-name="ce520" table:formula="of:=[.D18]+[.D17]+[.D14]+[.D6]" office:value-type="float" office:value="130715.538033446" calcext:value-type="float">
            <text:p><text:s/>130,715.54 </text:p>
          </table:table-cell>
          <table:table-cell table:style-name="ce520" table:formula="of:=[.E18]+[.E17]+[.E14]+[.E6]" office:value-type="float" office:value="130715.538033446" calcext:value-type="float">
            <text:p><text:s/>130,715.54 </text:p>
          </table:table-cell>
          <table:table-cell table:style-name="ce520" table:formula="of:=[.F18]+[.F17]+[.F14]+[.F6]" office:value-type="float" office:value="130715.538033446" calcext:value-type="float">
            <text:p><text:s/>130,715.54 </text:p>
          </table:table-cell>
          <table:table-cell table:number-columns-repeated="16378"/>
        </table:table-row>
        <table:table-row table:style-name="ro1">
          <table:table-cell/>
          <table:table-cell table:style-name="ce364"/>
          <table:table-cell table:number-columns-repeated="16382"/>
        </table:table-row>
        <table:table-row table:style-name="ro1">
          <table:table-cell table:style-name="ce658" office:value-type="string" calcext:value-type="string">
            <text:p>costo promedio por und de cuy</text:p>
          </table:table-cell>
          <table:table-cell table:style-name="ce661" table:formula="of:=[.B20]/[$INGRESOS.B13]" office:value-type="float" office:value="20.4302722069302" calcext:value-type="float">
            <text:p><text:s/>20.43 </text:p>
          </table:table-cell>
          <table:table-cell table:style-name="ce661" table:formula="of:=[.C20]/[$INGRESOS.C13]" office:value-type="float" office:value="11.4224930506234" calcext:value-type="float">
            <text:p><text:s/>11.42 </text:p>
          </table:table-cell>
          <table:table-cell table:style-name="ce661" table:formula="of:=[.D20]/[$INGRESOS.D13]" office:value-type="float" office:value="11.4224930506234" calcext:value-type="float">
            <text:p><text:s/>11.42 </text:p>
          </table:table-cell>
          <table:table-cell table:style-name="ce661" table:formula="of:=[.E20]/[$INGRESOS.E13]" office:value-type="float" office:value="11.4224930506234" calcext:value-type="float">
            <text:p><text:s/>11.42 </text:p>
          </table:table-cell>
          <table:table-cell table:style-name="ce661" table:formula="of:=[.F20]/[$INGRESOS.F13]" office:value-type="float" office:value="11.4224930506234" calcext:value-type="float">
            <text:p><text:s/>11.42 </text:p>
          </table:table-cell>
          <table:table-cell table:number-columns-repeated="16378"/>
        </table:table-row>
        <table:table-row table:style-name="ro1" table:number-rows-repeated="2">
          <table:table-cell/>
          <table:table-cell table:style-name="ce654"/>
          <table:table-cell table:number-columns-repeated="16382"/>
        </table:table-row>
        <table:table-row table:style-name="ro1">
          <table:table-cell table:style-name="ce590" office:value-type="string" calcext:value-type="string" table:number-columns-spanned="1" table:number-rows-spanned="2">
            <text:p>CONCEPTO</text:p>
          </table:table-cell>
          <table:table-cell table:style-name="ce590" office:value-type="string" calcext:value-type="string" table:number-columns-spanned="5" table:number-rows-spanned="1">
            <text:p>AÑOS</text:p>
          </table:table-cell>
          <table:covered-table-cell table:number-columns-repeated="4" table:style-name="ce590"/>
          <table:table-cell table:number-columns-repeated="16378"/>
        </table:table-row>
        <table:table-row table:style-name="ro1">
          <table:covered-table-cell table:style-name="ce590"/>
          <table:table-cell table:style-name="ce659" office:value-type="float" office:value="1" calcext:value-type="float">
            <text:p>1</text:p>
          </table:table-cell>
          <table:table-cell table:style-name="ce659" office:value-type="float" office:value="2" calcext:value-type="float">
            <text:p>2</text:p>
          </table:table-cell>
          <table:table-cell table:style-name="ce659" office:value-type="float" office:value="3" calcext:value-type="float">
            <text:p>3</text:p>
          </table:table-cell>
          <table:table-cell table:style-name="ce659" office:value-type="float" office:value="4" calcext:value-type="float">
            <text:p>4</text:p>
          </table:table-cell>
          <table:table-cell table:style-name="ce659" office:value-type="float" office:value="5" calcext:value-type="float">
            <text:p>5</text:p>
          </table:table-cell>
          <table:table-cell table:number-columns-repeated="16378"/>
        </table:table-row>
        <table:table-row table:style-name="ro1">
          <table:table-cell table:style-name="ce656" office:value-type="string" calcext:value-type="string">
            <text:p>Costos Totales</text:p>
          </table:table-cell>
          <table:table-cell table:style-name="ce521" table:formula="of:=[.B20]" office:value-type="float" office:value="65084.8085004154" calcext:value-type="float">
            <text:p><text:s/>65,084.81 </text:p>
          </table:table-cell>
          <table:table-cell table:style-name="ce521" table:formula="of:=[.C20]" office:value-type="float" office:value="130715.538033446" calcext:value-type="float">
            <text:p><text:s/>130,715.54 </text:p>
          </table:table-cell>
          <table:table-cell table:style-name="ce521" table:formula="of:=[.D20]" office:value-type="float" office:value="130715.538033446" calcext:value-type="float">
            <text:p><text:s/>130,715.54 </text:p>
          </table:table-cell>
          <table:table-cell table:style-name="ce521" table:formula="of:=[.E20]" office:value-type="float" office:value="130715.538033446" calcext:value-type="float">
            <text:p><text:s/>130,715.54 </text:p>
          </table:table-cell>
          <table:table-cell table:style-name="ce521" table:formula="of:=[.F20]" office:value-type="float" office:value="130715.538033446" calcext:value-type="float">
            <text:p><text:s/>130,715.54 </text:p>
          </table:table-cell>
          <table:table-cell table:number-columns-repeated="16378"/>
        </table:table-row>
        <table:table-row table:style-name="ro1">
          <table:table-cell table:style-name="ce656" office:value-type="string" calcext:value-type="string">
            <text:p>Produccion Und</text:p>
          </table:table-cell>
          <table:table-cell table:style-name="ce521" table:formula="of:=[$INGRESOS.B13]" office:value-type="float" office:value="3185.70442141921" calcext:value-type="float">
            <text:p><text:s/>3,185.70 </text:p>
          </table:table-cell>
          <table:table-cell table:style-name="ce521" table:formula="of:=[$INGRESOS.C13]" office:value-type="float" office:value="11443.696" calcext:value-type="float">
            <text:p><text:s/>11,443.70 </text:p>
          </table:table-cell>
          <table:table-cell table:style-name="ce521" table:formula="of:=[$INGRESOS.D13]" office:value-type="float" office:value="11443.696" calcext:value-type="float">
            <text:p><text:s/>11,443.70 </text:p>
          </table:table-cell>
          <table:table-cell table:style-name="ce521" table:formula="of:=[$INGRESOS.E13]" office:value-type="float" office:value="11443.696" calcext:value-type="float">
            <text:p><text:s/>11,443.70 </text:p>
          </table:table-cell>
          <table:table-cell table:style-name="ce521" table:formula="of:=[$INGRESOS.F13]" office:value-type="float" office:value="11443.696" calcext:value-type="float">
            <text:p><text:s/>11,443.70 </text:p>
          </table:table-cell>
          <table:table-cell table:number-columns-repeated="16378"/>
        </table:table-row>
        <table:table-row table:style-name="ro1">
          <table:table-cell table:style-name="ce656" office:value-type="string" calcext:value-type="string">
            <text:p>costo promedio unitario/und</text:p>
          </table:table-cell>
          <table:table-cell table:style-name="ce650" table:formula="of:=[.B27]/[.B28]" office:value-type="float" office:value="20.4302722069302" calcext:value-type="float">
            <text:p><text:s/>20.43 </text:p>
          </table:table-cell>
          <table:table-cell table:style-name="ce650" table:formula="of:=[.C27]/[.C28]" office:value-type="float" office:value="11.4224930506234" calcext:value-type="float">
            <text:p><text:s/>11.42 </text:p>
          </table:table-cell>
          <table:table-cell table:style-name="ce650" table:formula="of:=[.D27]/[.D28]" office:value-type="float" office:value="11.4224930506234" calcext:value-type="float">
            <text:p><text:s/>11.42 </text:p>
          </table:table-cell>
          <table:table-cell table:style-name="ce650" table:formula="of:=[.E27]/[.E28]" office:value-type="float" office:value="11.4224930506234" calcext:value-type="float">
            <text:p><text:s/>11.42 </text:p>
          </table:table-cell>
          <table:table-cell table:style-name="ce650" table:formula="of:=[.F27]/[.F28]" office:value-type="float" office:value="11.4224930506234" calcext:value-type="float">
            <text:p><text:s/>11.42 </text:p>
          </table:table-cell>
          <table:table-cell table:number-columns-repeated="16378"/>
        </table:table-row>
        <table:table-row table:style-name="ro1" table:number-rows-repeated="2">
          <table:table-cell/>
          <table:table-cell table:style-name="ce364"/>
          <table:table-cell table:number-columns-repeated="16382"/>
        </table:table-row>
        <table:table-row table:style-name="ro1">
          <table:table-cell/>
          <table:table-cell table:style-name="ce662"/>
          <table:table-cell table:number-columns-repeated="16382"/>
        </table:table-row>
        <table:table-row table:style-name="ro1">
          <table:table-cell/>
          <table:table-cell table:style-name="ce364"/>
          <table:table-cell table:number-columns-repeated="16382"/>
        </table:table-row>
        <table:table-row table:style-name="ro1" table:number-rows-repeated="3">
          <table:table-cell/>
          <table:table-cell table:style-name="ce364"/>
          <table:table-cell table:number-columns-repeated="16382"/>
        </table:table-row>
        <table:table-row table:style-name="ro1">
          <table:table-cell table:style-name="Default"/>
          <table:table-cell table:style-name="ce559"/>
          <table:table-cell table:style-name="Default" table:number-columns-repeated="5"/>
          <table:table-cell table:number-columns-repeated="16377"/>
        </table:table-row>
        <table:named-expressions>
          <table:named-range table:name="_xlnm.Print_Area" table:base-cell-address="$POBLACION.$A$1" table:cell-range-address="$'COSTOS TOTALES'.$A$3:.$F$29" table:range-usable-as="print-range"/>
        </table:named-expressions>
      </table:table>
      <table:table table:name="INGRESOS" table:style-name="ta18" table:print-ranges="INGRESOS.A2:INGRESOS.F14">
        <table:table-column table:style-name="co98" table:default-cell-style-name="ce519"/>
        <table:table-column table:style-name="co74" table:default-cell-style-name="ce519"/>
        <table:table-column table:style-name="co36" table:default-cell-style-name="ce519"/>
        <table:table-column table:style-name="co95" table:default-cell-style-name="ce519"/>
        <table:table-column table:style-name="co36" table:number-columns-repeated="2" table:default-cell-style-name="ce519"/>
        <table:table-column table:style-name="co7" table:default-cell-style-name="ce519"/>
        <table:table-column table:style-name="co1" table:number-columns-repeated="2" table:default-cell-style-name="ce519"/>
        <table:table-column table:style-name="co99" table:default-cell-style-name="ce519"/>
        <table:table-column table:style-name="co1" table:number-columns-repeated="16374" table:default-cell-style-name="ce519"/>
        <table:table-row table:style-name="ro1">
          <table:table-cell table:style-name="ce523" table:number-columns-repeated="7"/>
          <table:table-cell table:number-columns-repeated="16377"/>
        </table:table-row>
        <table:table-row table:style-name="ro1">
          <table:table-cell table:style-name="ce656" office:value-type="string" calcext:value-type="string">
            <text:p>PRECIO PROMEDIO (S/) x Und</text:p>
          </table:table-cell>
          <table:table-cell table:style-name="ce670" office:value-type="float" office:value="18" calcext:value-type="float">
            <text:p><text:s/>18.00 </text:p>
          </table:table-cell>
          <table:table-cell table:style-name="ce678"/>
          <table:table-cell table:number-columns-repeated="16381"/>
        </table:table-row>
        <table:table-row table:style-name="ro1">
          <table:table-cell table:style-name="ce523" table:number-columns-repeated="2"/>
          <table:table-cell table:number-columns-repeated="16382"/>
        </table:table-row>
        <table:table-row table:style-name="ro1">
          <table:table-cell table:number-columns-repeated="9"/>
          <table:table-cell table:style-name="ce679"/>
          <table:table-cell table:number-columns-repeated="16374"/>
        </table:table-row>
        <table:table-row table:style-name="ro1">
          <table:table-cell table:style-name="ce388" office:value-type="string" calcext:value-type="string" table:number-columns-spanned="6" table:number-rows-spanned="1">
            <text:p>PRESUPUESTO DE INGRESOS (SOLES)</text:p>
          </table:table-cell>
          <table:covered-table-cell table:number-columns-repeated="5" table:style-name="ce388"/>
          <table:table-cell table:number-columns-repeated="3"/>
          <table:table-cell table:style-name="ce679"/>
          <table:table-cell table:number-columns-repeated="16374"/>
        </table:table-row>
        <table:table-row table:style-name="ro14">
          <table:table-cell table:style-name="ce590" office:value-type="string" calcext:value-type="string" table:number-columns-spanned="1" table:number-rows-spanned="3">
            <text:p>CONCEPTO</text:p>
          </table:table-cell>
          <table:table-cell table:style-name="ce655" office:value-type="string" calcext:value-type="string" table:number-columns-spanned="5" table:number-rows-spanned="1">
            <text:p>AÑOS</text:p>
          </table:table-cell>
          <table:covered-table-cell table:number-columns-repeated="4" table:style-name="ce655"/>
          <table:table-cell table:number-columns-repeated="3"/>
          <table:table-cell table:style-name="ce679"/>
          <table:table-cell table:number-columns-repeated="16374"/>
        </table:table-row>
        <table:table-row table:style-name="ro1">
          <table:covered-table-cell table:style-name="ce590"/>
          <table:table-cell table:style-name="ce655" office:value-type="float" office:value="1" calcext:value-type="float">
            <text:p>1</text:p>
          </table:table-cell>
          <table:table-cell table:style-name="ce655" office:value-type="float" office:value="2" calcext:value-type="float">
            <text:p>2</text:p>
          </table:table-cell>
          <table:table-cell table:style-name="ce655" office:value-type="float" office:value="3" calcext:value-type="float">
            <text:p>3</text:p>
          </table:table-cell>
          <table:table-cell table:style-name="ce655" office:value-type="float" office:value="4" calcext:value-type="float">
            <text:p>4</text:p>
          </table:table-cell>
          <table:table-cell table:style-name="ce655" office:value-type="float" office:value="5" calcext:value-type="float">
            <text:p>5</text:p>
          </table:table-cell>
          <table:table-cell table:style-name="ce507" table:number-columns-repeated="3"/>
          <table:table-cell table:style-name="ce690"/>
          <table:table-cell table:style-name="ce507" table:number-columns-repeated="16374"/>
        </table:table-row>
        <table:table-row table:style-name="ro1">
          <table:covered-table-cell table:style-name="ce590"/>
          <table:table-cell table:style-name="ce520" table:formula="of:=[.B10]*[.B9]" office:value-type="float" office:value="57342.6795855458" calcext:value-type="float">
            <text:p><text:s/>57,342.68 </text:p>
          </table:table-cell>
          <table:table-cell table:style-name="ce520" table:formula="of:=[.C10]*[.C9]" office:value-type="float" office:value="205986.528" calcext:value-type="float">
            <text:p><text:s/>205,986.53 </text:p>
          </table:table-cell>
          <table:table-cell table:style-name="ce520" table:formula="of:=[.D10]*[.D9]" office:value-type="float" office:value="205986.528" calcext:value-type="float">
            <text:p><text:s/>205,986.53 </text:p>
          </table:table-cell>
          <table:table-cell table:style-name="ce520" table:formula="of:=[.E10]*[.E9]" office:value-type="float" office:value="205986.528" calcext:value-type="float">
            <text:p><text:s/>205,986.53 </text:p>
          </table:table-cell>
          <table:table-cell table:style-name="ce520" table:formula="of:=[.F10]*[.F9]" office:value-type="float" office:value="205986.528" calcext:value-type="float">
            <text:p><text:s/>205,986.53 </text:p>
          </table:table-cell>
          <table:table-cell table:number-columns-repeated="3"/>
          <table:table-cell table:style-name="ce522"/>
          <table:table-cell table:number-columns-repeated="16374"/>
        </table:table-row>
        <table:table-row table:style-name="ro1">
          <table:table-cell table:style-name="ce656" office:value-type="string" calcext:value-type="string">
            <text:p>Produccion Anual (Und)</text:p>
          </table:table-cell>
          <table:table-cell table:style-name="ce671" table:formula="of:=[$'PLAN DE PRODUCCION'.C4]" office:value-type="float" office:value="3185.70442141921" calcext:value-type="float">
            <text:p><text:s/>3,186 </text:p>
          </table:table-cell>
          <table:table-cell table:style-name="ce671" table:formula="of:=[$'PLAN DE PRODUCCION'.C5]" office:value-type="float" office:value="11443.696" calcext:value-type="float">
            <text:p><text:s/>11,444 </text:p>
          </table:table-cell>
          <table:table-cell table:style-name="ce671" table:formula="of:=[$'PLAN DE PRODUCCION'.C6]" office:value-type="float" office:value="11443.696" calcext:value-type="float">
            <text:p><text:s/>11,444 </text:p>
          </table:table-cell>
          <table:table-cell table:style-name="ce671" table:formula="of:=[$'PLAN DE PRODUCCION'.C7]" office:value-type="float" office:value="11443.696" calcext:value-type="float">
            <text:p><text:s/>11,444 </text:p>
          </table:table-cell>
          <table:table-cell table:style-name="ce671" table:formula="of:=[$'PLAN DE PRODUCCION'.C8]" office:value-type="float" office:value="11443.696" calcext:value-type="float">
            <text:p><text:s/>11,444 </text:p>
          </table:table-cell>
          <table:table-cell/>
          <table:table-cell table:style-name="ce679"/>
          <table:table-cell/>
          <table:table-cell table:style-name="ce679"/>
          <table:table-cell table:number-columns-repeated="16374"/>
        </table:table-row>
        <table:table-row table:style-name="ro1">
          <table:table-cell table:style-name="ce656" office:value-type="string" calcext:value-type="string">
            <text:p><text:s/>Precio <text:s/>proyectado <text:s/>Und</text:p>
          </table:table-cell>
          <table:table-cell table:style-name="ce671" table:formula="of:=[.B2]" office:value-type="float" office:value="18" calcext:value-type="float">
            <text:p><text:s/>18 </text:p>
          </table:table-cell>
          <table:table-cell table:style-name="ce671" table:formula="of:=+[.B10]" office:value-type="float" office:value="18" calcext:value-type="float">
            <text:p><text:s/>18 </text:p>
          </table:table-cell>
          <table:table-cell table:style-name="ce671" table:formula="of:=+[.C10]" office:value-type="float" office:value="18" calcext:value-type="float">
            <text:p><text:s/>18 </text:p>
          </table:table-cell>
          <table:table-cell table:style-name="ce671" table:formula="of:=+[.D10]" office:value-type="float" office:value="18" calcext:value-type="float">
            <text:p><text:s/>18 </text:p>
          </table:table-cell>
          <table:table-cell table:style-name="ce671" table:formula="of:=+[.E10]" office:value-type="float" office:value="18" calcext:value-type="float">
            <text:p><text:s/>18 </text:p>
          </table:table-cell>
          <table:table-cell table:number-columns-repeated="2"/>
          <table:table-cell table:style-name="ce679"/>
          <table:table-cell/>
          <table:table-cell table:style-name="ce679"/>
          <table:table-cell table:number-columns-repeated="16373"/>
        </table:table-row>
        <table:table-row table:style-name="ro1">
          <table:table-cell table:style-name="ce645" office:value-type="string" calcext:value-type="string">
            <text:p>TOTAL INGRESO</text:p>
          </table:table-cell>
          <table:table-cell table:style-name="ce520" table:formula="of:=[.B8]" office:value-type="float" office:value="57342.6795855458" calcext:value-type="float">
            <text:p><text:s/>57,342.68 </text:p>
          </table:table-cell>
          <table:table-cell table:style-name="ce520" table:formula="of:=[.C8]" office:value-type="float" office:value="205986.528" calcext:value-type="float">
            <text:p><text:s/>205,986.53 </text:p>
          </table:table-cell>
          <table:table-cell table:style-name="ce520" table:formula="of:=[.D8]" office:value-type="float" office:value="205986.528" calcext:value-type="float">
            <text:p><text:s/>205,986.53 </text:p>
          </table:table-cell>
          <table:table-cell table:style-name="ce520" table:formula="of:=[.E8]" office:value-type="float" office:value="205986.528" calcext:value-type="float">
            <text:p><text:s/>205,986.53 </text:p>
          </table:table-cell>
          <table:table-cell table:style-name="ce520" table:formula="of:=[.F8]" office:value-type="float" office:value="205986.528" calcext:value-type="float">
            <text:p><text:s/>205,986.53 </text:p>
          </table:table-cell>
          <table:table-cell table:number-columns-repeated="3"/>
          <table:table-cell table:style-name="ce679"/>
          <table:table-cell table:style-name="ce688"/>
          <table:table-cell table:number-columns-repeated="16373"/>
        </table:table-row>
        <table:table-row table:style-name="ro1">
          <table:table-cell table:style-name="ce507" office:value-type="string" calcext:value-type="string">
            <text:p>ELABORACION PROPIA</text:p>
          </table:table-cell>
          <table:table-cell table:number-columns-repeated="9"/>
          <table:table-cell table:style-name="ce688"/>
          <table:table-cell table:number-columns-repeated="16373"/>
        </table:table-row>
        <table:table-row table:style-name="ro1">
          <table:table-cell table:style-name="ce645" office:value-type="string" calcext:value-type="string">
            <text:p>Q</text:p>
          </table:table-cell>
          <table:table-cell table:style-name="ce520" table:formula="of:=[.B11]/[.B10]" office:value-type="float" office:value="3185.70442141921" calcext:value-type="float">
            <text:p><text:s/>3,185.70 </text:p>
          </table:table-cell>
          <table:table-cell table:style-name="ce520" table:formula="of:=[.C11]/[.C10]" office:value-type="float" office:value="11443.696" calcext:value-type="float">
            <text:p><text:s/>11,443.70 </text:p>
          </table:table-cell>
          <table:table-cell table:style-name="ce520" table:formula="of:=[.D11]/[.D10]" office:value-type="float" office:value="11443.696" calcext:value-type="float">
            <text:p><text:s/>11,443.70 </text:p>
          </table:table-cell>
          <table:table-cell table:style-name="ce520" table:formula="of:=[.E11]/[.E10]" office:value-type="float" office:value="11443.696" calcext:value-type="float">
            <text:p><text:s/>11,443.70 </text:p>
          </table:table-cell>
          <table:table-cell table:style-name="ce520" table:formula="of:=[.F11]/[.F10]" office:value-type="float" office:value="11443.696" calcext:value-type="float">
            <text:p><text:s/>11,443.70 </text:p>
          </table:table-cell>
          <table:table-cell table:style-name="ce689" office:value-type="string" calcext:value-type="string">
            <text:p>NO BORRAR</text:p>
          </table:table-cell>
          <table:table-cell table:number-columns-repeated="3"/>
          <table:table-cell table:style-name="ce688"/>
          <table:table-cell table:number-columns-repeated="16373"/>
        </table:table-row>
        <table:table-row table:style-name="ro1">
          <table:table-cell/>
          <table:table-cell table:style-name="ce672"/>
          <table:table-cell table:style-name="ce679" table:number-columns-repeated="3"/>
          <table:table-cell table:number-columns-repeated="5"/>
          <table:table-cell table:style-name="ce688"/>
          <table:table-cell table:number-columns-repeated="16373"/>
        </table:table-row>
        <table:table-row table:style-name="ro4">
          <table:table-cell table:style-name="ce664" office:value-type="string" calcext:value-type="string" table:number-columns-spanned="6" table:number-rows-spanned="1">
            <text:p>NOTA: CONSIDERANDO UN INCREMENTO PROYECTADO EN LAS VENTAS, EN BASE AL CUADRO DE PROYECCION DEL CUY Y CONSTANTE EL PRECIO DURANTE LOS CINCO AÑOS.</text:p>
          </table:table-cell>
          <table:covered-table-cell table:number-columns-repeated="5" table:style-name="ce664"/>
          <table:table-cell table:number-columns-repeated="4"/>
          <table:table-cell table:style-name="ce688"/>
          <table:table-cell table:number-columns-repeated="16373"/>
        </table:table-row>
        <table:table-row table:style-name="ro1">
          <table:table-cell table:number-columns-repeated="16384"/>
        </table:table-row>
        <table:table-row table:style-name="ro1">
          <table:table-cell table:number-columns-repeated="5"/>
          <table:table-cell table:formula="of:=+[.B9]/12" office:value-type="float" office:value="265.475368451601" calcext:value-type="float">
            <text:p>265.475368451601</text:p>
          </table:table-cell>
          <table:table-cell table:number-columns-repeated="16378"/>
        </table:table-row>
        <table:table-row table:style-name="ro41">
          <table:table-cell table:style-name="ce665" office:value-type="string" calcext:value-type="string">
            <text:p>COSTOS DE PRODUCCION</text:p>
          </table:table-cell>
          <table:table-cell table:style-name="ce673" office:value-type="string" calcext:value-type="string">
            <text:p>COSTO UNITARIO</text:p>
          </table:table-cell>
          <table:table-cell table:style-name="ce673" office:value-type="string" calcext:value-type="string">
            <text:p>CANTIDAD</text:p>
          </table:table-cell>
          <table:table-cell table:style-name="ce683" office:value-type="string" calcext:value-type="string">
            <text:p><text:s/>COSTO TOTAL</text:p>
          </table:table-cell>
          <table:table-cell/>
          <table:table-cell table:style-name="ce688" table:formula="of:=+[.C9]/12" office:value-type="float" office:value="953.641333333333" calcext:value-type="float">
            <text:p>953.64</text:p>
          </table:table-cell>
          <table:table-cell table:number-columns-repeated="16378"/>
        </table:table-row>
        <table:table-row table:style-name="ro1">
          <table:table-cell table:style-name="ce666" office:value-type="string" calcext:value-type="string">
            <text:p>MATERIA PRIMA (1unid.)</text:p>
          </table:table-cell>
          <table:table-cell table:style-name="ce674" office:value-type="string" calcext:value-type="string">
            <text:p>S/.</text:p>
          </table:table-cell>
          <table:table-cell table:style-name="ce674" office:value-type="string" calcext:value-type="string">
            <text:p>unid.</text:p>
          </table:table-cell>
          <table:table-cell table:style-name="ce684" office:value-type="string" calcext:value-type="string">
            <text:p>S/.</text:p>
          </table:table-cell>
          <table:table-cell/>
          <table:table-cell table:style-name="ce688"/>
          <table:table-cell table:number-columns-repeated="16378"/>
        </table:table-row>
        <table:table-row table:style-name="ro1">
          <table:table-cell table:style-name="ce667" office:value-type="string" calcext:value-type="string">
            <text:p>1. Alimentacion</text:p>
          </table:table-cell>
          <table:table-cell table:style-name="ce675" office:value-type="float" office:value="7" calcext:value-type="float">
            <text:p>7.00</text:p>
          </table:table-cell>
          <table:table-cell table:style-name="ce680" office:value-type="float" office:value="1" calcext:value-type="float">
            <text:p>1</text:p>
          </table:table-cell>
          <table:table-cell table:style-name="ce685" table:formula="of:=+[.B20]*[.C20]" office:value-type="float" office:value="7" calcext:value-type="float">
            <text:p>7</text:p>
          </table:table-cell>
          <table:table-cell/>
          <table:table-cell table:style-name="ce688"/>
          <table:table-cell table:number-columns-repeated="16378"/>
        </table:table-row>
        <table:table-row table:style-name="ro1">
          <table:table-cell table:style-name="ce667" office:value-type="string" calcext:value-type="string">
            <text:p>2. Mano de Obra en op. Y mant.</text:p>
          </table:table-cell>
          <table:table-cell table:style-name="ce675" office:value-type="float" office:value="0.8" calcext:value-type="float">
            <text:p>0.80</text:p>
          </table:table-cell>
          <table:table-cell table:style-name="ce680" office:value-type="float" office:value="1" calcext:value-type="float">
            <text:p>1</text:p>
          </table:table-cell>
          <table:table-cell table:style-name="ce685" table:formula="of:=+[.B21]*[.C21]" office:value-type="float" office:value="0.8" calcext:value-type="float">
            <text:p>0.8</text:p>
          </table:table-cell>
          <table:table-cell/>
          <table:table-cell table:style-name="ce688"/>
          <table:table-cell table:number-columns-repeated="16378"/>
        </table:table-row>
        <table:table-row table:style-name="ro1">
          <table:table-cell table:style-name="ce667" office:value-type="string" calcext:value-type="string">
            <text:p>3. Tratamiento sanitario</text:p>
          </table:table-cell>
          <table:table-cell table:style-name="ce675" office:value-type="float" office:value="0.4" calcext:value-type="float">
            <text:p>0.40</text:p>
          </table:table-cell>
          <table:table-cell table:style-name="ce680" office:value-type="float" office:value="1" calcext:value-type="float">
            <text:p>1</text:p>
          </table:table-cell>
          <table:table-cell table:style-name="ce685" table:formula="of:=+[.B22]*[.C22]" office:value-type="float" office:value="0.4" calcext:value-type="float">
            <text:p>0.4</text:p>
          </table:table-cell>
          <table:table-cell/>
          <table:table-cell table:style-name="ce688"/>
          <table:table-cell table:number-columns-repeated="16378"/>
        </table:table-row>
        <table:table-row table:style-name="ro1">
          <table:table-cell table:style-name="ce666" office:value-type="string" calcext:value-type="string">
            <text:p>OTROS</text:p>
          </table:table-cell>
          <table:table-cell table:style-name="ce674" office:value-type="string" calcext:value-type="string">
            <text:p>S/.</text:p>
          </table:table-cell>
          <table:table-cell table:style-name="ce674" office:value-type="string" calcext:value-type="string">
            <text:p>UNIDAD</text:p>
          </table:table-cell>
          <table:table-cell table:style-name="ce684" office:value-type="string" calcext:value-type="string">
            <text:p>S/.</text:p>
          </table:table-cell>
          <table:table-cell table:number-columns-repeated="16380"/>
        </table:table-row>
        <table:table-row table:style-name="ro1">
          <table:table-cell table:style-name="ce667" office:value-type="string" calcext:value-type="string">
            <text:p>4. mano de obra en empaque</text:p>
          </table:table-cell>
          <table:table-cell table:style-name="ce675" office:value-type="float" office:value="0.03" calcext:value-type="float">
            <text:p>0.03</text:p>
          </table:table-cell>
          <table:table-cell table:style-name="ce680" office:value-type="float" office:value="1" calcext:value-type="float">
            <text:p>1</text:p>
          </table:table-cell>
          <table:table-cell table:style-name="ce685" table:formula="of:=+[.B24]*[.C24]" office:value-type="float" office:value="0.03" calcext:value-type="float">
            <text:p>0.03</text:p>
          </table:table-cell>
          <table:table-cell table:number-columns-repeated="16380"/>
        </table:table-row>
        <table:table-row table:style-name="ro1">
          <table:table-cell table:style-name="ce667" office:value-type="string" calcext:value-type="string">
            <text:p>5. otros gastos</text:p>
          </table:table-cell>
          <table:table-cell table:style-name="ce675" office:value-type="float" office:value="0.03" calcext:value-type="float">
            <text:p>0.03</text:p>
          </table:table-cell>
          <table:table-cell table:style-name="ce680" office:value-type="float" office:value="1" calcext:value-type="float">
            <text:p>1</text:p>
          </table:table-cell>
          <table:table-cell table:style-name="ce685" table:formula="of:=+[.B25]*[.C25]" office:value-type="float" office:value="0.03" calcext:value-type="float">
            <text:p>0.03</text:p>
          </table:table-cell>
          <table:table-cell table:number-columns-repeated="16380"/>
        </table:table-row>
        <table:table-row table:style-name="ro1">
          <table:table-cell table:style-name="ce668" office:value-type="string" calcext:value-type="string">
            <text:p>6. servicio de transporte</text:p>
          </table:table-cell>
          <table:table-cell table:style-name="ce676" office:value-type="float" office:value="0.15" calcext:value-type="float">
            <text:p>0.15</text:p>
          </table:table-cell>
          <table:table-cell table:style-name="ce681" office:value-type="float" office:value="1" calcext:value-type="float">
            <text:p>1</text:p>
          </table:table-cell>
          <table:table-cell table:style-name="ce686" table:formula="of:=+[.B26]*[.C26]" office:value-type="float" office:value="0.15" calcext:value-type="float">
            <text:p>0.15</text:p>
          </table:table-cell>
          <table:table-cell table:number-columns-repeated="16380"/>
        </table:table-row>
        <table:table-row table:style-name="ro1">
          <table:table-cell table:style-name="ce669" office:value-type="string" calcext:value-type="string">
            <text:p>COSTO TOTAL POR 1 unid. (S.)</text:p>
          </table:table-cell>
          <table:table-cell table:style-name="ce677"/>
          <table:table-cell table:style-name="ce682"/>
          <table:table-cell table:style-name="ce687" table:formula="of:=+SUM([.D20:.D26])" office:value-type="float" office:value="8.41" calcext:value-type="float">
            <text:p>8.41</text:p>
          </table:table-cell>
          <table:table-cell table:number-columns-repeated="16380"/>
        </table:table-row>
        <table:table-row table:style-name="ro1" table:number-rows-repeated="1048548">
          <table:table-cell table:number-columns-repeated="16384"/>
        </table:table-row>
        <table:table-row table:style-name="ro1">
          <table:table-cell table:number-columns-repeated="16384"/>
        </table:table-row>
        <table:named-expressions>
          <table:named-range table:name="_xlnm.Print_Area" table:base-cell-address="$POBLACION.$A$1" table:cell-range-address="$INGRESOS.$A$2:.$F$14" table:range-usable-as="print-range"/>
        </table:named-expressions>
      </table:table>
      <table:table table:name="ESTADO GyP" table:style-name="ta19" table:print-ranges="'ESTADO GyP'.A4:'ESTADO GyP'.N80">
        <table:table-column table:style-name="co59" table:default-cell-style-name="ce691"/>
        <table:table-column table:style-name="co63" table:number-columns-repeated="4" table:default-cell-style-name="ce691"/>
        <table:table-column table:style-name="co100" table:default-cell-style-name="ce691"/>
        <table:table-column table:style-name="co39" table:default-cell-style-name="ce691"/>
        <table:table-column table:style-name="co101" table:default-cell-style-name="ce691"/>
        <table:table-column table:style-name="co89" table:default-cell-style-name="ce691"/>
        <table:table-column table:style-name="co63" table:number-columns-repeated="2" table:default-cell-style-name="ce691"/>
        <table:table-column table:style-name="co7" table:number-columns-repeated="2" table:default-cell-style-name="ce691"/>
        <table:table-column table:style-name="co102" table:default-cell-style-name="ce691"/>
        <table:table-column table:style-name="co1" table:number-columns-repeated="16370" table:default-cell-style-name="ce691"/>
        <table:table-row table:style-name="ro26" table:number-rows-repeated="3">
          <table:table-cell table:number-columns-repeated="16384"/>
        </table:table-row>
        <table:table-row table:style-name="ro14">
          <table:table-cell table:style-name="ce692" office:value-type="string" calcext:value-type="string" table:number-columns-spanned="6" table:number-rows-spanned="1">
            <text:p><text:s/>ESTADO DE RESULTADOS SIN FINANCIAMIENTO</text:p>
          </table:table-cell>
          <table:covered-table-cell table:number-columns-repeated="5" table:style-name="ce692"/>
          <table:table-cell/>
          <table:table-cell table:style-name="ce692" office:value-type="string" calcext:value-type="string" table:number-columns-spanned="6" table:number-rows-spanned="1">
            <text:p><text:s/>ESTADO DE RESULTADOS CON GASTOS FINANCIEROS</text:p>
          </table:table-cell>
          <table:covered-table-cell table:number-columns-repeated="5" table:style-name="ce692"/>
          <table:table-cell table:number-columns-repeated="16371"/>
        </table:table-row>
        <table:table-row table:style-name="ro14">
          <table:table-cell table:style-name="ce429" office:value-type="string" calcext:value-type="string" table:number-columns-spanned="1" table:number-rows-spanned="2">
            <text:p>CONCEPTO</text:p>
          </table:table-cell>
          <table:table-cell table:style-name="ce429" office:value-type="string" calcext:value-type="string" table:number-columns-spanned="5" table:number-rows-spanned="1">
            <text:p>AÑOS</text:p>
          </table:table-cell>
          <table:covered-table-cell table:number-columns-repeated="3" table:style-name="ce703"/>
          <table:covered-table-cell table:style-name="ce705"/>
          <table:table-cell table:style-name="ce706"/>
          <table:table-cell table:style-name="ce429" office:value-type="string" calcext:value-type="string" table:number-columns-spanned="1" table:number-rows-spanned="2">
            <text:p>CONCEPTO</text:p>
          </table:table-cell>
          <table:table-cell table:style-name="ce429" office:value-type="string" calcext:value-type="string" table:number-columns-spanned="5" table:number-rows-spanned="1">
            <text:p>AÑOS</text:p>
          </table:table-cell>
          <table:covered-table-cell table:number-columns-repeated="3" table:style-name="ce703"/>
          <table:covered-table-cell table:style-name="ce705"/>
          <table:table-cell table:number-columns-repeated="16371"/>
        </table:table-row>
        <table:table-row table:style-name="ro26">
          <table:covered-table-cell table:style-name="ce429"/>
          <table:table-cell table:style-name="ce429" office:value-type="float" office:value="1" calcext:value-type="float">
            <text:p>1</text:p>
          </table:table-cell>
          <table:table-cell table:style-name="ce429" office:value-type="float" office:value="2" calcext:value-type="float">
            <text:p>2</text:p>
          </table:table-cell>
          <table:table-cell table:style-name="ce429" office:value-type="float" office:value="3" calcext:value-type="float">
            <text:p>3</text:p>
          </table:table-cell>
          <table:table-cell table:style-name="ce429" office:value-type="float" office:value="4" calcext:value-type="float">
            <text:p>4</text:p>
          </table:table-cell>
          <table:table-cell table:style-name="ce429" office:value-type="float" office:value="5" calcext:value-type="float">
            <text:p>5</text:p>
          </table:table-cell>
          <table:table-cell/>
          <table:covered-table-cell table:style-name="ce429"/>
          <table:table-cell table:style-name="ce429" office:value-type="float" office:value="1" calcext:value-type="float">
            <text:p>1</text:p>
          </table:table-cell>
          <table:table-cell table:style-name="ce429" office:value-type="float" office:value="2" calcext:value-type="float">
            <text:p>2</text:p>
          </table:table-cell>
          <table:table-cell table:style-name="ce429" office:value-type="float" office:value="3" calcext:value-type="float">
            <text:p>3</text:p>
          </table:table-cell>
          <table:table-cell table:style-name="ce429" office:value-type="float" office:value="4" calcext:value-type="float">
            <text:p>4</text:p>
          </table:table-cell>
          <table:table-cell table:style-name="ce429" office:value-type="float" office:value="5" calcext:value-type="float">
            <text:p>5</text:p>
          </table:table-cell>
          <table:table-cell table:number-columns-repeated="16371"/>
        </table:table-row>
        <table:table-row table:style-name="ro22">
          <table:table-cell table:style-name="ce693" office:value-type="string" calcext:value-type="string">
            <text:p>I. INGRESOS (VENTAS)</text:p>
          </table:table-cell>
          <table:table-cell table:style-name="ce700" table:formula="of:=SUM([.B8:.B9])" office:value-type="float" office:value="57342.6795855458" calcext:value-type="float">
            <text:p><text:s/>57,342.68 </text:p>
          </table:table-cell>
          <table:table-cell table:style-name="ce700" table:formula="of:=SUM([.C8:.C9])" office:value-type="float" office:value="205986.528" calcext:value-type="float">
            <text:p><text:s/>205,986.53 </text:p>
          </table:table-cell>
          <table:table-cell table:style-name="ce700" table:formula="of:=SUM([.D8:.D9])" office:value-type="float" office:value="205986.528" calcext:value-type="float">
            <text:p><text:s/>205,986.53 </text:p>
          </table:table-cell>
          <table:table-cell table:style-name="ce700" table:formula="of:=SUM([.E8:.E9])" office:value-type="float" office:value="205986.528" calcext:value-type="float">
            <text:p><text:s/>205,986.53 </text:p>
          </table:table-cell>
          <table:table-cell table:style-name="ce700" table:formula="of:=SUM([.F8:.F9])" office:value-type="float" office:value="275403.205966102" calcext:value-type="float">
            <text:p><text:s/>275,403.21 </text:p>
          </table:table-cell>
          <table:table-cell/>
          <table:table-cell table:style-name="ce693" office:value-type="string" calcext:value-type="string">
            <text:p>I. INGRESOS (VENTAS)</text:p>
          </table:table-cell>
          <table:table-cell table:style-name="ce700" table:formula="of:=SUM([.I8:.I9])" office:value-type="float" office:value="57342.6795855458" calcext:value-type="float">
            <text:p><text:s/>57,342.68 </text:p>
          </table:table-cell>
          <table:table-cell table:style-name="ce700" table:formula="of:=SUM([.J8:.J9])" office:value-type="float" office:value="205986.528" calcext:value-type="float">
            <text:p><text:s/>205,986.53 </text:p>
          </table:table-cell>
          <table:table-cell table:style-name="ce700" table:formula="of:=SUM([.K8:.K9])" office:value-type="float" office:value="205986.528" calcext:value-type="float">
            <text:p><text:s/>205,986.53 </text:p>
          </table:table-cell>
          <table:table-cell table:style-name="ce700" table:formula="of:=SUM([.L8:.L9])" office:value-type="float" office:value="205986.528" calcext:value-type="float">
            <text:p><text:s/>205,986.53 </text:p>
          </table:table-cell>
          <table:table-cell table:style-name="ce700" table:formula="of:=SUM([.M8:.M9])" office:value-type="float" office:value="275403.205966102" calcext:value-type="float">
            <text:p><text:s/>275,403.21 </text:p>
          </table:table-cell>
          <table:table-cell table:number-columns-repeated="16371"/>
        </table:table-row>
        <table:table-row table:style-name="ro42">
          <table:table-cell table:style-name="ce694" office:value-type="string" calcext:value-type="string">
            <text:p>Ventas</text:p>
          </table:table-cell>
          <table:table-cell table:style-name="ce701" table:formula="of:=[$INGRESOS.B11]" office:value-type="float" office:value="57342.6795855458" calcext:value-type="float">
            <text:p><text:s/>57,342.68 </text:p>
          </table:table-cell>
          <table:table-cell table:style-name="ce701" table:formula="of:=[$INGRESOS.C11]" office:value-type="float" office:value="205986.528" calcext:value-type="float">
            <text:p><text:s/>205,986.53 </text:p>
          </table:table-cell>
          <table:table-cell table:style-name="ce701" table:formula="of:=[$INGRESOS.D11]" office:value-type="float" office:value="205986.528" calcext:value-type="float">
            <text:p><text:s/>205,986.53 </text:p>
          </table:table-cell>
          <table:table-cell table:style-name="ce701" table:formula="of:=[$INGRESOS.E11]" office:value-type="float" office:value="205986.528" calcext:value-type="float">
            <text:p><text:s/>205,986.53 </text:p>
          </table:table-cell>
          <table:table-cell table:style-name="ce701" table:formula="of:=[$INGRESOS.F11]" office:value-type="float" office:value="205986.528" calcext:value-type="float">
            <text:p><text:s/>205,986.53 </text:p>
          </table:table-cell>
          <table:table-cell table:style-name="ce707"/>
          <table:table-cell table:style-name="ce694" office:value-type="string" calcext:value-type="string">
            <text:p>Ventas</text:p>
          </table:table-cell>
          <table:table-cell table:style-name="ce701" table:formula="of:=[.B8]" office:value-type="float" office:value="57342.6795855458" calcext:value-type="float">
            <text:p><text:s/>57,342.68 </text:p>
          </table:table-cell>
          <table:table-cell table:style-name="ce701" table:formula="of:=[.C8]" office:value-type="float" office:value="205986.528" calcext:value-type="float">
            <text:p><text:s/>205,986.53 </text:p>
          </table:table-cell>
          <table:table-cell table:style-name="ce701" table:formula="of:=[.D8]" office:value-type="float" office:value="205986.528" calcext:value-type="float">
            <text:p><text:s/>205,986.53 </text:p>
          </table:table-cell>
          <table:table-cell table:style-name="ce701" table:formula="of:=[.E8]" office:value-type="float" office:value="205986.528" calcext:value-type="float">
            <text:p><text:s/>205,986.53 </text:p>
          </table:table-cell>
          <table:table-cell table:style-name="ce701" table:formula="of:=[.F8]" office:value-type="float" office:value="205986.528" calcext:value-type="float">
            <text:p><text:s/>205,986.53 </text:p>
          </table:table-cell>
          <table:table-cell table:style-name="ce707" table:number-columns-repeated="16371"/>
        </table:table-row>
        <table:table-row table:style-name="ro42">
          <table:table-cell table:style-name="ce694" office:value-type="string" calcext:value-type="string">
            <text:p>Ingresos extraordinarios</text:p>
          </table:table-cell>
          <table:table-cell table:style-name="ce701" table:number-columns-repeated="4"/>
          <table:table-cell table:style-name="ce701" table:formula="of:=[$'DEPRECIAC '.H16]" office:value-type="float" office:value="69416.6779661017" calcext:value-type="float">
            <text:p><text:s/>69,416.68 </text:p>
          </table:table-cell>
          <table:table-cell table:style-name="ce707"/>
          <table:table-cell table:style-name="ce694" office:value-type="string" calcext:value-type="string">
            <text:p>Ingresos extraordinarios</text:p>
          </table:table-cell>
          <table:table-cell table:style-name="ce701" table:formula="of:=[.B9]" office:value-type="float" office:value="0" calcext:value-type="float">
            <text:p><text:s/>- <text:s text:c="2"/></text:p>
          </table:table-cell>
          <table:table-cell table:style-name="ce701" table:formula="of:=[.C9]" office:value-type="float" office:value="0" calcext:value-type="float">
            <text:p><text:s/>- <text:s text:c="2"/></text:p>
          </table:table-cell>
          <table:table-cell table:style-name="ce701" table:formula="of:=[.D9]" office:value-type="float" office:value="0" calcext:value-type="float">
            <text:p><text:s/>- <text:s text:c="2"/></text:p>
          </table:table-cell>
          <table:table-cell table:style-name="ce701" table:formula="of:=[.E9]" office:value-type="float" office:value="0" calcext:value-type="float">
            <text:p><text:s/>- <text:s text:c="2"/></text:p>
          </table:table-cell>
          <table:table-cell table:style-name="ce701" table:formula="of:=[.F9]" office:value-type="float" office:value="69416.6779661017" calcext:value-type="float">
            <text:p><text:s/>69,416.68 </text:p>
          </table:table-cell>
          <table:table-cell table:style-name="ce707" table:number-columns-repeated="16371"/>
        </table:table-row>
        <table:table-row table:style-name="ro26">
          <table:table-cell table:style-name="ce693" office:value-type="string" calcext:value-type="string">
            <text:p>II. COSTOS DE PRODUCCIÒN</text:p>
          </table:table-cell>
          <table:table-cell table:style-name="ce701" table:formula="of:=[$'COSTOS TOTALES'.B6]" office:value-type="float" office:value="45407.0823105033" calcext:value-type="float">
            <text:p><text:s/>45,407.08 </text:p>
          </table:table-cell>
          <table:table-cell table:style-name="ce701" table:formula="of:=[$'COSTOS TOTALES'.C6]" office:value-type="float" office:value="116426.673626667" calcext:value-type="float">
            <text:p><text:s/>116,426.67 </text:p>
          </table:table-cell>
          <table:table-cell table:style-name="ce701" table:formula="of:=[$'COSTOS TOTALES'.D6]" office:value-type="float" office:value="116426.673626667" calcext:value-type="float">
            <text:p><text:s/>116,426.67 </text:p>
          </table:table-cell>
          <table:table-cell table:style-name="ce701" table:formula="of:=[$'COSTOS TOTALES'.E6]" office:value-type="float" office:value="116426.673626667" calcext:value-type="float">
            <text:p><text:s/>116,426.67 </text:p>
          </table:table-cell>
          <table:table-cell table:style-name="ce701" table:formula="of:=[$'COSTOS TOTALES'.F6]" office:value-type="float" office:value="116426.673626667" calcext:value-type="float">
            <text:p><text:s/>116,426.67 </text:p>
          </table:table-cell>
          <table:table-cell/>
          <table:table-cell table:style-name="ce693" office:value-type="string" calcext:value-type="string">
            <text:p>II. COSTOS DE PRODUCCIÒN</text:p>
          </table:table-cell>
          <table:table-cell table:style-name="ce700" table:formula="of:=[.B10]" office:value-type="float" office:value="45407.0823105033" calcext:value-type="float">
            <text:p><text:s/>45,407.08 </text:p>
          </table:table-cell>
          <table:table-cell table:style-name="ce700" table:formula="of:=[.C10]" office:value-type="float" office:value="116426.673626667" calcext:value-type="float">
            <text:p><text:s/>116,426.67 </text:p>
          </table:table-cell>
          <table:table-cell table:style-name="ce700" table:formula="of:=[.D10]" office:value-type="float" office:value="116426.673626667" calcext:value-type="float">
            <text:p><text:s/>116,426.67 </text:p>
          </table:table-cell>
          <table:table-cell table:style-name="ce700" table:formula="of:=[.E10]" office:value-type="float" office:value="116426.673626667" calcext:value-type="float">
            <text:p><text:s/>116,426.67 </text:p>
          </table:table-cell>
          <table:table-cell table:style-name="ce700" table:formula="of:=[.F10]" office:value-type="float" office:value="116426.673626667" calcext:value-type="float">
            <text:p><text:s/>116,426.67 </text:p>
          </table:table-cell>
          <table:table-cell table:number-columns-repeated="16371"/>
        </table:table-row>
        <table:table-row table:style-name="ro26">
          <table:table-cell table:style-name="ce693" office:value-type="string" calcext:value-type="string">
            <text:p>III. UTILIDAD BRUTA</text:p>
          </table:table-cell>
          <table:table-cell table:style-name="ce700" table:formula="of:=[.B7]-[.B10]" office:value-type="float" office:value="11935.5972750425" calcext:value-type="float">
            <text:p><text:s/>11,935.60 </text:p>
          </table:table-cell>
          <table:table-cell table:style-name="ce700" table:formula="of:=[.C7]-[.C10]" office:value-type="float" office:value="89559.8543733333" calcext:value-type="float">
            <text:p><text:s/>89,559.85 </text:p>
          </table:table-cell>
          <table:table-cell table:style-name="ce700" table:formula="of:=[.D7]-[.D10]" office:value-type="float" office:value="89559.8543733333" calcext:value-type="float">
            <text:p><text:s/>89,559.85 </text:p>
          </table:table-cell>
          <table:table-cell table:style-name="ce700" table:formula="of:=[.E7]-[.E10]" office:value-type="float" office:value="89559.8543733333" calcext:value-type="float">
            <text:p><text:s/>89,559.85 </text:p>
          </table:table-cell>
          <table:table-cell table:style-name="ce700" table:formula="of:=[.F7]-[.F10]" office:value-type="float" office:value="158976.532339435" calcext:value-type="float">
            <text:p><text:s/>158,976.53 </text:p>
          </table:table-cell>
          <table:table-cell table:style-name="ce697"/>
          <table:table-cell table:style-name="ce693" office:value-type="string" calcext:value-type="string">
            <text:p>III. UTILIDAD BRUTA</text:p>
          </table:table-cell>
          <table:table-cell table:style-name="ce700" table:formula="of:=[.I7]-[.I10]" office:value-type="float" office:value="11935.5972750425" calcext:value-type="float">
            <text:p><text:s/>11,935.60 </text:p>
          </table:table-cell>
          <table:table-cell table:style-name="ce700" table:formula="of:=[.J7]-[.J10]" office:value-type="float" office:value="89559.8543733333" calcext:value-type="float">
            <text:p><text:s/>89,559.85 </text:p>
          </table:table-cell>
          <table:table-cell table:style-name="ce700" table:formula="of:=[.K7]-[.K10]" office:value-type="float" office:value="89559.8543733333" calcext:value-type="float">
            <text:p><text:s/>89,559.85 </text:p>
          </table:table-cell>
          <table:table-cell table:style-name="ce700" table:formula="of:=[.L7]-[.L10]" office:value-type="float" office:value="89559.8543733333" calcext:value-type="float">
            <text:p><text:s/>89,559.85 </text:p>
          </table:table-cell>
          <table:table-cell table:style-name="ce700" table:formula="of:=[.M7]-[.M10]" office:value-type="float" office:value="158976.532339435" calcext:value-type="float">
            <text:p><text:s/>158,976.53 </text:p>
          </table:table-cell>
          <table:table-cell table:style-name="ce697" table:number-columns-repeated="16371"/>
        </table:table-row>
        <table:table-row table:style-name="ro14">
          <table:table-cell table:style-name="ce693" office:value-type="string" calcext:value-type="string">
            <text:p>IV. GASTOS DE OPERACIÒN</text:p>
          </table:table-cell>
          <table:table-cell table:style-name="ce700" table:formula="of:=[.B13]+[.B14]" office:value-type="float" office:value="4987" calcext:value-type="float">
            <text:p><text:s/>4,987.00 </text:p>
          </table:table-cell>
          <table:table-cell table:style-name="ce700" table:formula="of:=[.C13]+[.C14]" office:value-type="float" office:value="4987" calcext:value-type="float">
            <text:p><text:s/>4,987.00 </text:p>
          </table:table-cell>
          <table:table-cell table:style-name="ce700" table:formula="of:=[.D13]+[.D14]" office:value-type="float" office:value="4987" calcext:value-type="float">
            <text:p><text:s/>4,987.00 </text:p>
          </table:table-cell>
          <table:table-cell table:style-name="ce700" table:formula="of:=[.E13]+[.E14]" office:value-type="float" office:value="4987" calcext:value-type="float">
            <text:p><text:s/>4,987.00 </text:p>
          </table:table-cell>
          <table:table-cell table:style-name="ce700" table:formula="of:=[.F13]+[.F14]" office:value-type="float" office:value="4987" calcext:value-type="float">
            <text:p><text:s/>4,987.00 </text:p>
          </table:table-cell>
          <table:table-cell/>
          <table:table-cell table:style-name="ce693" office:value-type="string" calcext:value-type="string">
            <text:p>IV. GASTOS DE OPERACIÒN</text:p>
          </table:table-cell>
          <table:table-cell table:style-name="ce700" table:formula="of:=[.I13]+[.I14]" office:value-type="float" office:value="4987" calcext:value-type="float">
            <text:p><text:s/>4,987.00 </text:p>
          </table:table-cell>
          <table:table-cell table:style-name="ce700" table:formula="of:=[.J13]+[.J14]" office:value-type="float" office:value="4987" calcext:value-type="float">
            <text:p><text:s/>4,987.00 </text:p>
          </table:table-cell>
          <table:table-cell table:style-name="ce700" table:formula="of:=[.K13]+[.K14]" office:value-type="float" office:value="4987" calcext:value-type="float">
            <text:p><text:s/>4,987.00 </text:p>
          </table:table-cell>
          <table:table-cell table:style-name="ce700" table:formula="of:=[.L13]+[.L14]" office:value-type="float" office:value="4987" calcext:value-type="float">
            <text:p><text:s/>4,987.00 </text:p>
          </table:table-cell>
          <table:table-cell table:style-name="ce700" table:formula="of:=[.M13]+[.M14]" office:value-type="float" office:value="4987" calcext:value-type="float">
            <text:p><text:s/>4,987.00 </text:p>
          </table:table-cell>
          <table:table-cell table:number-columns-repeated="16371"/>
        </table:table-row>
        <table:table-row table:style-name="ro26">
          <table:table-cell table:style-name="ce695" office:value-type="string" calcext:value-type="string">
            <text:p><text:s text:c="5"/>Gastos de venta</text:p>
          </table:table-cell>
          <table:table-cell table:style-name="ce701" table:formula="of:=[$'COSTOS TOTALES'.B15]" office:value-type="float" office:value="3139" calcext:value-type="float">
            <text:p><text:s/>3,139.00 </text:p>
          </table:table-cell>
          <table:table-cell table:style-name="ce701" table:formula="of:=[$'COSTOS TOTALES'.C15]" office:value-type="float" office:value="3139" calcext:value-type="float">
            <text:p><text:s/>3,139.00 </text:p>
          </table:table-cell>
          <table:table-cell table:style-name="ce701" table:formula="of:=[$'COSTOS TOTALES'.D15]" office:value-type="float" office:value="3139" calcext:value-type="float">
            <text:p><text:s/>3,139.00 </text:p>
          </table:table-cell>
          <table:table-cell table:style-name="ce701" table:formula="of:=[$'COSTOS TOTALES'.E15]" office:value-type="float" office:value="3139" calcext:value-type="float">
            <text:p><text:s/>3,139.00 </text:p>
          </table:table-cell>
          <table:table-cell table:style-name="ce701" table:formula="of:=[$'COSTOS TOTALES'.F15]" office:value-type="float" office:value="3139" calcext:value-type="float">
            <text:p><text:s/>3,139.00 </text:p>
          </table:table-cell>
          <table:table-cell/>
          <table:table-cell table:style-name="ce695" office:value-type="string" calcext:value-type="string">
            <text:p><text:s text:c="5"/>Gastos de venta</text:p>
          </table:table-cell>
          <table:table-cell table:style-name="ce701" table:formula="of:=[.B13]" office:value-type="float" office:value="3139" calcext:value-type="float">
            <text:p><text:s/>3,139.00 </text:p>
          </table:table-cell>
          <table:table-cell table:style-name="ce701" table:formula="of:=[.C13]" office:value-type="float" office:value="3139" calcext:value-type="float">
            <text:p><text:s/>3,139.00 </text:p>
          </table:table-cell>
          <table:table-cell table:style-name="ce701" table:formula="of:=[.D13]" office:value-type="float" office:value="3139" calcext:value-type="float">
            <text:p><text:s/>3,139.00 </text:p>
          </table:table-cell>
          <table:table-cell table:style-name="ce701" table:formula="of:=[.E13]" office:value-type="float" office:value="3139" calcext:value-type="float">
            <text:p><text:s/>3,139.00 </text:p>
          </table:table-cell>
          <table:table-cell table:style-name="ce701" table:formula="of:=[.F13]" office:value-type="float" office:value="3139" calcext:value-type="float">
            <text:p><text:s/>3,139.00 </text:p>
          </table:table-cell>
          <table:table-cell table:number-columns-repeated="16371"/>
        </table:table-row>
        <table:table-row table:style-name="ro26">
          <table:table-cell table:style-name="ce695" office:value-type="string" calcext:value-type="string">
            <text:p><text:s text:c="4"/>Gastos administrativos</text:p>
          </table:table-cell>
          <table:table-cell table:style-name="ce701" table:formula="of:=[$'COSTOS TOTALES'.B16]" office:value-type="float" office:value="1848" calcext:value-type="float">
            <text:p><text:s/>1,848.00 </text:p>
          </table:table-cell>
          <table:table-cell table:style-name="ce701" table:formula="of:=[$'COSTOS TOTALES'.C16]" office:value-type="float" office:value="1848" calcext:value-type="float">
            <text:p><text:s/>1,848.00 </text:p>
          </table:table-cell>
          <table:table-cell table:style-name="ce701" table:formula="of:=[$'COSTOS TOTALES'.D16]" office:value-type="float" office:value="1848" calcext:value-type="float">
            <text:p><text:s/>1,848.00 </text:p>
          </table:table-cell>
          <table:table-cell table:style-name="ce701" table:formula="of:=[$'COSTOS TOTALES'.E16]" office:value-type="float" office:value="1848" calcext:value-type="float">
            <text:p><text:s/>1,848.00 </text:p>
          </table:table-cell>
          <table:table-cell table:style-name="ce701" table:formula="of:=[$'COSTOS TOTALES'.F16]" office:value-type="float" office:value="1848" calcext:value-type="float">
            <text:p><text:s/>1,848.00 </text:p>
          </table:table-cell>
          <table:table-cell/>
          <table:table-cell table:style-name="ce695" office:value-type="string" calcext:value-type="string">
            <text:p><text:s text:c="4"/>Gastos administrativos</text:p>
          </table:table-cell>
          <table:table-cell table:style-name="ce701" table:formula="of:=[.B14]" office:value-type="float" office:value="1848" calcext:value-type="float">
            <text:p><text:s/>1,848.00 </text:p>
          </table:table-cell>
          <table:table-cell table:style-name="ce701" table:formula="of:=[.C14]" office:value-type="float" office:value="1848" calcext:value-type="float">
            <text:p><text:s/>1,848.00 </text:p>
          </table:table-cell>
          <table:table-cell table:style-name="ce701" table:formula="of:=[.D14]" office:value-type="float" office:value="1848" calcext:value-type="float">
            <text:p><text:s/>1,848.00 </text:p>
          </table:table-cell>
          <table:table-cell table:style-name="ce701" table:formula="of:=[.E14]" office:value-type="float" office:value="1848" calcext:value-type="float">
            <text:p><text:s/>1,848.00 </text:p>
          </table:table-cell>
          <table:table-cell table:style-name="ce701" table:formula="of:=[.F14]" office:value-type="float" office:value="1848" calcext:value-type="float">
            <text:p><text:s/>1,848.00 </text:p>
          </table:table-cell>
          <table:table-cell table:number-columns-repeated="16371"/>
        </table:table-row>
        <table:table-row table:style-name="ro26">
          <table:table-cell table:style-name="ce693" office:value-type="string" calcext:value-type="string">
            <text:p>V. DEPRECIACIÒN DE A.F. Y AMORT. INTANG</text:p>
          </table:table-cell>
          <table:table-cell table:style-name="ce701" table:formula="of:=[$'COSTOS TOTALES'.B17]" office:value-type="float" office:value="9301.86440677966" calcext:value-type="float">
            <text:p><text:s/>9,301.86 </text:p>
          </table:table-cell>
          <table:table-cell table:style-name="ce701" table:formula="of:=[$'COSTOS TOTALES'.C17]" office:value-type="float" office:value="9301.86440677966" calcext:value-type="float">
            <text:p><text:s/>9,301.86 </text:p>
          </table:table-cell>
          <table:table-cell table:style-name="ce701" table:formula="of:=[$'COSTOS TOTALES'.D17]" office:value-type="float" office:value="9301.86440677966" calcext:value-type="float">
            <text:p><text:s/>9,301.86 </text:p>
          </table:table-cell>
          <table:table-cell table:style-name="ce701" table:formula="of:=[$'COSTOS TOTALES'.E17]" office:value-type="float" office:value="9301.86440677966" calcext:value-type="float">
            <text:p><text:s/>9,301.86 </text:p>
          </table:table-cell>
          <table:table-cell table:style-name="ce701" table:formula="of:=[$'COSTOS TOTALES'.F17]" office:value-type="float" office:value="9301.86440677966" calcext:value-type="float">
            <text:p><text:s/>9,301.86 </text:p>
          </table:table-cell>
          <table:table-cell/>
          <table:table-cell table:style-name="ce693" office:value-type="string" calcext:value-type="string">
            <text:p>V. DEPRECIACIÒN DE A.F. Y AMORT. INTANG</text:p>
          </table:table-cell>
          <table:table-cell table:style-name="ce700" table:formula="of:=[.B15]" office:value-type="float" office:value="9301.86440677966" calcext:value-type="float">
            <text:p><text:s/>9,301.86 </text:p>
          </table:table-cell>
          <table:table-cell table:style-name="ce700" table:formula="of:=[.C15]" office:value-type="float" office:value="9301.86440677966" calcext:value-type="float">
            <text:p><text:s/>9,301.86 </text:p>
          </table:table-cell>
          <table:table-cell table:style-name="ce700" table:formula="of:=[.D15]" office:value-type="float" office:value="9301.86440677966" calcext:value-type="float">
            <text:p><text:s/>9,301.86 </text:p>
          </table:table-cell>
          <table:table-cell table:style-name="ce700" table:formula="of:=[.E15]" office:value-type="float" office:value="9301.86440677966" calcext:value-type="float">
            <text:p><text:s/>9,301.86 </text:p>
          </table:table-cell>
          <table:table-cell table:style-name="ce700" table:formula="of:=[.F15]" office:value-type="float" office:value="9301.86440677966" calcext:value-type="float">
            <text:p><text:s/>9,301.86 </text:p>
          </table:table-cell>
          <table:table-cell table:number-columns-repeated="16371"/>
        </table:table-row>
        <table:table-row table:style-name="ro26">
          <table:table-cell table:style-name="ce693" office:value-type="string" calcext:value-type="string">
            <text:p>VI. UTILIDAD OPERATIVA</text:p>
          </table:table-cell>
          <table:table-cell table:style-name="ce700" table:formula="of:=[.B11]-[.B12]-[.B15]" office:value-type="float" office:value="-2353.26713173716" calcext:value-type="float">
            <text:p><text:s/>(2,353.27)</text:p>
          </table:table-cell>
          <table:table-cell table:style-name="ce700" table:formula="of:=[.C11]-[.C12]-[.C15]" office:value-type="float" office:value="75270.9899665537" calcext:value-type="float">
            <text:p><text:s/>75,270.99 </text:p>
          </table:table-cell>
          <table:table-cell table:style-name="ce700" table:formula="of:=[.D11]-[.D12]-[.D15]" office:value-type="float" office:value="75270.9899665537" calcext:value-type="float">
            <text:p><text:s/>75,270.99 </text:p>
          </table:table-cell>
          <table:table-cell table:style-name="ce700" table:formula="of:=[.E11]-[.E12]-[.E15]" office:value-type="float" office:value="75270.9899665537" calcext:value-type="float">
            <text:p><text:s/>75,270.99 </text:p>
          </table:table-cell>
          <table:table-cell table:style-name="ce700" table:formula="of:=[.F11]-[.F12]-[.F15]" office:value-type="float" office:value="144687.667932655" calcext:value-type="float">
            <text:p><text:s/>144,687.67 </text:p>
          </table:table-cell>
          <table:table-cell table:style-name="ce697"/>
          <table:table-cell table:style-name="ce693" office:value-type="string" calcext:value-type="string">
            <text:p>VI. UTILIDAD OPERATIVA</text:p>
          </table:table-cell>
          <table:table-cell table:style-name="ce700" table:formula="of:=[.I11]-[.I12]-[.I15]" office:value-type="float" office:value="-2353.26713173716" calcext:value-type="float">
            <text:p><text:s/>(2,353.27)</text:p>
          </table:table-cell>
          <table:table-cell table:style-name="ce700" table:formula="of:=[.J11]-[.J12]-[.J15]" office:value-type="float" office:value="75270.9899665537" calcext:value-type="float">
            <text:p><text:s/>75,270.99 </text:p>
          </table:table-cell>
          <table:table-cell table:style-name="ce700" table:formula="of:=[.K11]-[.K12]-[.K15]" office:value-type="float" office:value="75270.9899665537" calcext:value-type="float">
            <text:p><text:s/>75,270.99 </text:p>
          </table:table-cell>
          <table:table-cell table:style-name="ce700" table:formula="of:=[.L11]-[.L12]-[.L15]" office:value-type="float" office:value="75270.9899665537" calcext:value-type="float">
            <text:p><text:s/>75,270.99 </text:p>
          </table:table-cell>
          <table:table-cell table:style-name="ce700" table:formula="of:=[.M11]-[.M12]-[.M15]" office:value-type="float" office:value="144687.667932655" calcext:value-type="float">
            <text:p><text:s/>144,687.67 </text:p>
          </table:table-cell>
          <table:table-cell table:style-name="ce697" table:number-columns-repeated="16371"/>
        </table:table-row>
        <table:table-row table:style-name="ro26">
          <table:table-cell table:style-name="ce693" office:value-type="string" calcext:value-type="string">
            <text:p>IX. IMPUESTO A LA RENTA ( 30 % )</text:p>
          </table:table-cell>
          <table:table-cell table:style-name="ce700" table:formula="of:=[.B16]*0.3" office:value-type="float" office:value="-705.980139521147" calcext:value-type="float">
            <text:p><text:s/>(705.98)</text:p>
          </table:table-cell>
          <table:table-cell table:style-name="ce700" table:formula="of:=[.C16]*0.3" office:value-type="float" office:value="22581.2969899661" calcext:value-type="float">
            <text:p><text:s/>22,581.30 </text:p>
          </table:table-cell>
          <table:table-cell table:style-name="ce700" table:formula="of:=[.D16]*0.3" office:value-type="float" office:value="22581.2969899661" calcext:value-type="float">
            <text:p><text:s/>22,581.30 </text:p>
          </table:table-cell>
          <table:table-cell table:style-name="ce700" table:formula="of:=[.E16]*0.3" office:value-type="float" office:value="22581.2969899661" calcext:value-type="float">
            <text:p><text:s/>22,581.30 </text:p>
          </table:table-cell>
          <table:table-cell table:style-name="ce700" table:formula="of:=[.F16]*0.3" office:value-type="float" office:value="43406.3003797966" calcext:value-type="float">
            <text:p><text:s/>43,406.30 </text:p>
          </table:table-cell>
          <table:table-cell/>
          <table:table-cell table:style-name="ce710" office:value-type="string" calcext:value-type="string">
            <text:p>VII. GASTOS FINANCIEROS</text:p>
          </table:table-cell>
          <table:table-cell table:style-name="ce713" table:formula="of:=SUM([.I18:.I18])" office:value-type="float" office:value="388.861783132515" calcext:value-type="float">
            <text:p><text:s/>388.86 </text:p>
          </table:table-cell>
          <table:table-cell table:style-name="ce713" table:formula="of:=SUM([.J18:.J18])" office:value-type="float" office:value="0" calcext:value-type="float">
            <text:p><text:s/>- <text:s text:c="2"/></text:p>
          </table:table-cell>
          <table:table-cell table:style-name="ce713" table:formula="of:=SUM([.K18:.K18])" office:value-type="float" office:value="0" calcext:value-type="float">
            <text:p><text:s/>- <text:s text:c="2"/></text:p>
          </table:table-cell>
          <table:table-cell table:style-name="ce713" table:formula="of:=SUM([.L18:.L18])" office:value-type="float" office:value="0" calcext:value-type="float">
            <text:p><text:s/>- <text:s text:c="2"/></text:p>
          </table:table-cell>
          <table:table-cell table:style-name="ce713" table:formula="of:=SUM([.M18:.M18])" office:value-type="float" office:value="0" calcext:value-type="float">
            <text:p><text:s/>- <text:s text:c="2"/></text:p>
          </table:table-cell>
          <table:table-cell table:number-columns-repeated="16371"/>
        </table:table-row>
        <table:table-row table:style-name="ro26">
          <table:table-cell table:style-name="ce693" office:value-type="string" calcext:value-type="string">
            <text:p>UTILIDAD NETA</text:p>
          </table:table-cell>
          <table:table-cell table:style-name="ce700" table:formula="of:=[.B16]-[.B17]" office:value-type="float" office:value="-1647.28699221601" calcext:value-type="float">
            <text:p><text:s/>(1,647.29)</text:p>
          </table:table-cell>
          <table:table-cell table:style-name="ce700" table:formula="of:=[.C16]-[.C17]" office:value-type="float" office:value="52689.6929765876" calcext:value-type="float">
            <text:p><text:s/>52,689.69 </text:p>
          </table:table-cell>
          <table:table-cell table:style-name="ce700" table:formula="of:=[.D16]-[.D17]" office:value-type="float" office:value="52689.6929765876" calcext:value-type="float">
            <text:p><text:s/>52,689.69 </text:p>
          </table:table-cell>
          <table:table-cell table:style-name="ce700" table:formula="of:=[.E16]-[.E17]" office:value-type="float" office:value="52689.6929765876" calcext:value-type="float">
            <text:p><text:s/>52,689.69 </text:p>
          </table:table-cell>
          <table:table-cell table:style-name="ce700" table:formula="of:=[.F16]-[.F17]" office:value-type="float" office:value="101281.367552859" calcext:value-type="float">
            <text:p><text:s/>101,281.37 </text:p>
          </table:table-cell>
          <table:table-cell/>
          <table:table-cell table:style-name="ce711" office:value-type="string" calcext:value-type="string">
            <text:p><text:s text:c="4"/>Pago de intereses</text:p>
          </table:table-cell>
          <table:table-cell table:style-name="ce714" table:formula="of:=[$FINANCIAMIENT.B52]" office:value-type="float" office:value="388.861783132515" calcext:value-type="float">
            <text:p><text:s/>388.86 </text:p>
          </table:table-cell>
          <table:table-cell table:style-name="ce714" table:formula="of:=[$FINANCIAMIENT.C52]" office:value-type="float" office:value="0" calcext:value-type="float">
            <text:p><text:s/>- <text:s text:c="2"/></text:p>
          </table:table-cell>
          <table:table-cell table:style-name="ce714" table:formula="of:=[$FINANCIAMIENT.D52]" office:value-type="float" office:value="0" calcext:value-type="float">
            <text:p><text:s/>- <text:s text:c="2"/></text:p>
          </table:table-cell>
          <table:table-cell table:number-columns-repeated="2" table:style-name="ce714" office:value-type="float" office:value="0" calcext:value-type="float">
            <text:p><text:s/>- <text:s text:c="2"/></text:p>
          </table:table-cell>
          <table:table-cell table:number-columns-repeated="16371"/>
        </table:table-row>
        <table:table-row table:style-name="ro26">
          <table:table-cell table:style-name="ce696"/>
          <table:table-cell table:style-name="ce702" table:number-columns-repeated="5"/>
          <table:table-cell table:style-name="ce697"/>
          <table:table-cell table:style-name="ce710" office:value-type="string" calcext:value-type="string">
            <text:p>VIII. UTILIDAD ANTES DE IMPUESTO</text:p>
          </table:table-cell>
          <table:table-cell table:style-name="ce713" table:formula="of:=[.I16]-[.I17]" office:value-type="float" office:value="-2742.12891486967" calcext:value-type="float">
            <text:p><text:s/>(2,742.13)</text:p>
          </table:table-cell>
          <table:table-cell table:style-name="ce713" table:formula="of:=[.J16]-[.J17]" office:value-type="float" office:value="75270.9899665537" calcext:value-type="float">
            <text:p><text:s/>75,270.99 </text:p>
          </table:table-cell>
          <table:table-cell table:style-name="ce713" table:formula="of:=[.K16]-[.K17]" office:value-type="float" office:value="75270.9899665537" calcext:value-type="float">
            <text:p><text:s/>75,270.99 </text:p>
          </table:table-cell>
          <table:table-cell table:style-name="ce713" table:formula="of:=[.L16]-[.L17]" office:value-type="float" office:value="75270.9899665537" calcext:value-type="float">
            <text:p><text:s/>75,270.99 </text:p>
          </table:table-cell>
          <table:table-cell table:style-name="ce713" table:formula="of:=[.M16]-[.M17]" office:value-type="float" office:value="144687.667932655" calcext:value-type="float">
            <text:p><text:s/>144,687.67 </text:p>
          </table:table-cell>
          <table:table-cell table:style-name="ce697" table:number-columns-repeated="16371"/>
        </table:table-row>
        <table:table-row table:style-name="ro26">
          <table:table-cell table:number-columns-repeated="7"/>
          <table:table-cell table:style-name="ce693" office:value-type="string" calcext:value-type="string">
            <text:p>IX. IMPUESTO A LA RENTA ( 30 % )</text:p>
          </table:table-cell>
          <table:table-cell table:style-name="ce700" table:formula="of:=[.I19]*0.3" office:value-type="float" office:value="-822.638674460901" calcext:value-type="float">
            <text:p><text:s/>(822.64)</text:p>
          </table:table-cell>
          <table:table-cell table:style-name="ce700" table:formula="of:=[.J19]*0.3" office:value-type="float" office:value="22581.2969899661" calcext:value-type="float">
            <text:p><text:s/>22,581.30 </text:p>
          </table:table-cell>
          <table:table-cell table:style-name="ce700" table:formula="of:=[.K19]*0.3" office:value-type="float" office:value="22581.2969899661" calcext:value-type="float">
            <text:p><text:s/>22,581.30 </text:p>
          </table:table-cell>
          <table:table-cell table:style-name="ce700" table:formula="of:=[.L19]*0.3" office:value-type="float" office:value="22581.2969899661" calcext:value-type="float">
            <text:p><text:s/>22,581.30 </text:p>
          </table:table-cell>
          <table:table-cell table:style-name="ce700" table:formula="of:=[.M19]*0.3" office:value-type="float" office:value="43406.3003797966" calcext:value-type="float">
            <text:p><text:s/>43,406.30 </text:p>
          </table:table-cell>
          <table:table-cell table:number-columns-repeated="16371"/>
        </table:table-row>
        <table:table-row table:style-name="ro26">
          <table:table-cell table:style-name="ce697" table:number-columns-repeated="7"/>
          <table:table-cell table:style-name="ce693" office:value-type="string" calcext:value-type="string">
            <text:p>UTILIDAD NETA</text:p>
          </table:table-cell>
          <table:table-cell table:style-name="ce700" table:formula="of:=[.I19]-[.I20]" office:value-type="float" office:value="-1919.49024040877" calcext:value-type="float">
            <text:p><text:s/>(1,919.49)</text:p>
          </table:table-cell>
          <table:table-cell table:style-name="ce700" table:formula="of:=[.J19]-[.J20]" office:value-type="float" office:value="52689.6929765876" calcext:value-type="float">
            <text:p><text:s/>52,689.69 </text:p>
          </table:table-cell>
          <table:table-cell table:style-name="ce700" table:formula="of:=[.K19]-[.K20]" office:value-type="float" office:value="52689.6929765876" calcext:value-type="float">
            <text:p><text:s/>52,689.69 </text:p>
          </table:table-cell>
          <table:table-cell table:style-name="ce700" table:formula="of:=[.L19]-[.L20]" office:value-type="float" office:value="52689.6929765876" calcext:value-type="float">
            <text:p><text:s/>52,689.69 </text:p>
          </table:table-cell>
          <table:table-cell table:style-name="ce700" table:formula="of:=[.M19]-[.M20]" office:value-type="float" office:value="101281.367552859" calcext:value-type="float">
            <text:p><text:s/>101,281.37 </text:p>
          </table:table-cell>
          <table:table-cell table:style-name="ce697" table:number-columns-repeated="16371"/>
        </table:table-row>
        <table:table-row table:style-name="ro26">
          <table:table-cell table:style-name="ce698" office:value-type="string" calcext:value-type="string">
            <text:p>ELABORACION PROPIA</text:p>
          </table:table-cell>
          <table:table-cell table:style-name="ce699" table:number-columns-repeated="6"/>
          <table:table-cell table:style-name="ce698" office:value-type="string" calcext:value-type="string">
            <text:p>ELABORACION PROPIA</text:p>
          </table:table-cell>
          <table:table-cell table:style-name="ce699" table:number-columns-repeated="5"/>
          <table:table-cell table:number-columns-repeated="16371"/>
        </table:table-row>
        <table:table-row table:style-name="ro26">
          <table:table-cell table:style-name="ce698"/>
          <table:table-cell table:style-name="ce699"/>
          <table:table-cell table:style-name="ce704"/>
          <table:table-cell table:style-name="ce699" table:number-columns-repeated="4"/>
          <table:table-cell table:number-columns-repeated="16377"/>
        </table:table-row>
        <table:table-row table:style-name="ro26">
          <table:table-cell table:style-name="ce699" table:number-columns-repeated="7"/>
          <table:table-cell table:number-columns-repeated="16377"/>
        </table:table-row>
        <table:table-row table:style-name="ro26">
          <table:table-cell table:style-name="ce693" office:value-type="string" calcext:value-type="string">
            <text:p>INVERSION</text:p>
          </table:table-cell>
          <table:table-cell table:style-name="ce700" table:formula="of:=[$INVERSION.F16]" office:value-type="float" office:value="140058.565385523" calcext:value-type="float">
            <text:p><text:s/>140,058.57 </text:p>
          </table:table-cell>
          <table:table-cell table:style-name="ce699" table:number-columns-repeated="5"/>
          <table:table-cell table:number-columns-repeated="16377"/>
        </table:table-row>
        <table:table-row table:style-name="ro26">
          <table:table-cell table:number-columns-repeated="7"/>
          <table:table-cell table:style-name="ce699" table:number-columns-repeated="3"/>
          <table:table-cell table:style-name="ce718" office:value-type="string" calcext:value-type="string">
            <text:p>PUNTO DE EQUILIBRIO CON PRESTAMO</text:p>
          </table:table-cell>
          <table:table-cell table:style-name="ce699" table:number-columns-repeated="3"/>
          <table:table-cell table:number-columns-repeated="16370"/>
        </table:table-row>
        <table:table-row table:style-name="ro14">
          <table:table-cell table:number-columns-repeated="7"/>
          <table:table-cell table:style-name="ce310" office:value-type="string" calcext:value-type="string" table:number-columns-spanned="1" table:number-rows-spanned="2">
            <text:p>RUBROS</text:p>
          </table:table-cell>
          <table:table-cell table:style-name="ce310" office:value-type="string" calcext:value-type="string" table:number-columns-spanned="5" table:number-rows-spanned="1">
            <text:p>AÑOS</text:p>
          </table:table-cell>
          <table:covered-table-cell table:number-columns-repeated="3" table:style-name="ce642"/>
          <table:covered-table-cell table:style-name="ce643"/>
          <table:table-cell table:number-columns-repeated="16371"/>
        </table:table-row>
        <table:table-row table:style-name="ro42">
          <table:table-cell table:number-columns-repeated="7"/>
          <table:covered-table-cell table:style-name="ce310"/>
          <table:table-cell table:style-name="ce310" office:value-type="float" office:value="1" calcext:value-type="float">
            <text:p>1</text:p>
          </table:table-cell>
          <table:table-cell table:style-name="ce310" office:value-type="float" office:value="2" calcext:value-type="float">
            <text:p>2</text:p>
          </table:table-cell>
          <table:table-cell table:style-name="ce310" office:value-type="float" office:value="3" calcext:value-type="float">
            <text:p>3</text:p>
          </table:table-cell>
          <table:table-cell table:style-name="ce310" office:value-type="float" office:value="4" calcext:value-type="float">
            <text:p>4</text:p>
          </table:table-cell>
          <table:table-cell table:style-name="ce310" office:value-type="float" office:value="5" calcext:value-type="float">
            <text:p>5</text:p>
          </table:table-cell>
          <table:table-cell table:number-columns-repeated="16371"/>
        </table:table-row>
        <table:table-row table:style-name="ro42">
          <table:table-cell table:style-name="ce697" table:number-columns-repeated="7"/>
          <table:table-cell table:style-name="ce347" office:value-type="string" calcext:value-type="string">
            <text:p>COSTOS FIJOS.</text:p>
          </table:table-cell>
          <table:table-cell table:style-name="ce343" table:formula="of:=SUM([.I30:.I32])" office:value-type="float" office:value="16538.7261899122" calcext:value-type="float">
            <text:p><text:s/>16,538.73 </text:p>
          </table:table-cell>
          <table:table-cell table:style-name="ce343" table:formula="of:=SUM([.J30:.J32])" office:value-type="float" office:value="11149.8644067797" calcext:value-type="float">
            <text:p><text:s/>11,149.86 </text:p>
          </table:table-cell>
          <table:table-cell table:style-name="ce343" table:formula="of:=SUM([.K30:.K32])" office:value-type="float" office:value="11149.8644067797" calcext:value-type="float">
            <text:p><text:s/>11,149.86 </text:p>
          </table:table-cell>
          <table:table-cell table:style-name="ce343" table:formula="of:=SUM([.L30:.L32])" office:value-type="float" office:value="11149.8644067797" calcext:value-type="float">
            <text:p><text:s/>11,149.86 </text:p>
          </table:table-cell>
          <table:table-cell table:style-name="ce343" table:formula="of:=SUM([.M30:.M32])" office:value-type="float" office:value="11149.8644067797" calcext:value-type="float">
            <text:p><text:s/>11,149.86 </text:p>
          </table:table-cell>
          <table:table-cell table:style-name="ce697" office:value-type="string" calcext:value-type="string">
            <text:p>cf</text:p>
          </table:table-cell>
          <table:table-cell table:style-name="ce697" table:number-columns-repeated="16370"/>
        </table:table-row>
        <table:table-row table:style-name="ro42">
          <table:table-cell table:number-columns-repeated="7"/>
          <table:table-cell table:style-name="ce337" office:value-type="string" calcext:value-type="string">
            <text:p>DEPRECIACIÒN DE A.F. Y AMORT. INTANG</text:p>
          </table:table-cell>
          <table:table-cell table:style-name="ce342" table:formula="of:=[.B15]" office:value-type="float" office:value="9301.86440677966" calcext:value-type="float">
            <text:p><text:s/>9,301.86 </text:p>
          </table:table-cell>
          <table:table-cell table:style-name="ce342" table:formula="of:=[.C15]" office:value-type="float" office:value="9301.86440677966" calcext:value-type="float">
            <text:p><text:s/>9,301.86 </text:p>
          </table:table-cell>
          <table:table-cell table:style-name="ce342" table:formula="of:=[.D15]" office:value-type="float" office:value="9301.86440677966" calcext:value-type="float">
            <text:p><text:s/>9,301.86 </text:p>
          </table:table-cell>
          <table:table-cell table:style-name="ce342" table:formula="of:=[.E15]" office:value-type="float" office:value="9301.86440677966" calcext:value-type="float">
            <text:p><text:s/>9,301.86 </text:p>
          </table:table-cell>
          <table:table-cell table:style-name="ce342" table:formula="of:=[.F15]" office:value-type="float" office:value="9301.86440677966" calcext:value-type="float">
            <text:p><text:s/>9,301.86 </text:p>
          </table:table-cell>
          <table:table-cell table:number-columns-repeated="16371"/>
        </table:table-row>
        <table:table-row table:style-name="ro42">
          <table:table-cell table:number-columns-repeated="7"/>
          <table:table-cell table:style-name="ce337" office:value-type="string" calcext:value-type="string">
            <text:p>GASTOS FINANCIEROS (Pago de prestamo)</text:p>
          </table:table-cell>
          <table:table-cell table:style-name="ce342" table:formula="of:=[$FINANCIAMIENT.B53]" office:value-type="float" office:value="5388.86178313251" calcext:value-type="float">
            <text:p><text:s/>5,388.86 </text:p>
          </table:table-cell>
          <table:table-cell table:style-name="ce342" table:formula="of:=[$FINANCIAMIENT.C53]" office:value-type="float" office:value="0" calcext:value-type="float">
            <text:p><text:s/>- <text:s text:c="2"/></text:p>
          </table:table-cell>
          <table:table-cell table:style-name="ce342" table:formula="of:=[$FINANCIAMIENT.D53]" office:value-type="float" office:value="0" calcext:value-type="float">
            <text:p><text:s/>- <text:s text:c="2"/></text:p>
          </table:table-cell>
          <table:table-cell table:style-name="ce342" table:formula="of:=[$FINANCIAMIENT.E53]" office:value-type="float" office:value="0" calcext:value-type="float">
            <text:p><text:s/>- <text:s text:c="2"/></text:p>
          </table:table-cell>
          <table:table-cell table:style-name="ce342" table:formula="of:=[$FINANCIAMIENT.F53]" office:value-type="float" office:value="0" calcext:value-type="float">
            <text:p><text:s/>- <text:s text:c="2"/></text:p>
          </table:table-cell>
          <table:table-cell table:number-columns-repeated="16371"/>
        </table:table-row>
        <table:table-row table:style-name="ro42">
          <table:table-cell table:number-columns-repeated="4"/>
          <table:table-cell office:value-type="string" calcext:value-type="string">
            <text:p><text:s/></text:p>
          </table:table-cell>
          <table:table-cell table:number-columns-repeated="2"/>
          <table:table-cell table:style-name="ce337" office:value-type="string" calcext:value-type="string">
            <text:p>GASTOS ADMINISTRATIVOS</text:p>
          </table:table-cell>
          <table:table-cell table:style-name="ce342" table:formula="of:=[.B14]" office:value-type="float" office:value="1848" calcext:value-type="float">
            <text:p><text:s/>1,848.00 </text:p>
          </table:table-cell>
          <table:table-cell table:style-name="ce342" table:formula="of:=[.C14]" office:value-type="float" office:value="1848" calcext:value-type="float">
            <text:p><text:s/>1,848.00 </text:p>
          </table:table-cell>
          <table:table-cell table:style-name="ce342" table:formula="of:=[.D14]" office:value-type="float" office:value="1848" calcext:value-type="float">
            <text:p><text:s/>1,848.00 </text:p>
          </table:table-cell>
          <table:table-cell table:style-name="ce342" table:formula="of:=[.E14]" office:value-type="float" office:value="1848" calcext:value-type="float">
            <text:p><text:s/>1,848.00 </text:p>
          </table:table-cell>
          <table:table-cell table:style-name="ce342" table:formula="of:=[.F14]" office:value-type="float" office:value="1848" calcext:value-type="float">
            <text:p><text:s/>1,848.00 </text:p>
          </table:table-cell>
          <table:table-cell table:number-columns-repeated="16371"/>
        </table:table-row>
        <table:table-row table:style-name="ro42">
          <table:table-cell table:style-name="ce697" table:number-columns-repeated="7"/>
          <table:table-cell table:style-name="ce347" office:value-type="string" calcext:value-type="string">
            <text:p>COSTOS VARIABLES</text:p>
          </table:table-cell>
          <table:table-cell table:style-name="ce343" table:formula="of:=[.I34]+[.I35]" office:value-type="float" office:value="48546.0823105033" calcext:value-type="float">
            <text:p><text:s/>48,546.08 </text:p>
          </table:table-cell>
          <table:table-cell table:style-name="ce343" table:formula="of:=[.J34]+[.J35]" office:value-type="float" office:value="119565.673626667" calcext:value-type="float">
            <text:p><text:s/>119,565.67 </text:p>
          </table:table-cell>
          <table:table-cell table:style-name="ce343" table:formula="of:=[.K34]+[.K35]" office:value-type="float" office:value="119565.673626667" calcext:value-type="float">
            <text:p><text:s/>119,565.67 </text:p>
          </table:table-cell>
          <table:table-cell table:style-name="ce343" table:formula="of:=[.L34]+[.L35]" office:value-type="float" office:value="119565.673626667" calcext:value-type="float">
            <text:p><text:s/>119,565.67 </text:p>
          </table:table-cell>
          <table:table-cell table:style-name="ce343" table:formula="of:=[.M34]+[.M35]" office:value-type="float" office:value="119565.673626667" calcext:value-type="float">
            <text:p><text:s/>119,565.67 </text:p>
          </table:table-cell>
          <table:table-cell table:style-name="ce697" table:number-columns-repeated="16371"/>
        </table:table-row>
        <table:table-row table:style-name="ro42">
          <table:table-cell table:number-columns-repeated="7"/>
          <table:table-cell table:style-name="ce337" office:value-type="string" calcext:value-type="string">
            <text:p>COSTOS DE PRODUCCIÒN</text:p>
          </table:table-cell>
          <table:table-cell table:style-name="ce342" table:formula="of:=[.B10]" office:value-type="float" office:value="45407.0823105033" calcext:value-type="float">
            <text:p><text:s/>45,407.08 </text:p>
          </table:table-cell>
          <table:table-cell table:style-name="ce342" table:formula="of:=[.C10]" office:value-type="float" office:value="116426.673626667" calcext:value-type="float">
            <text:p><text:s/>116,426.67 </text:p>
          </table:table-cell>
          <table:table-cell table:style-name="ce342" table:formula="of:=[.D10]" office:value-type="float" office:value="116426.673626667" calcext:value-type="float">
            <text:p><text:s/>116,426.67 </text:p>
          </table:table-cell>
          <table:table-cell table:style-name="ce342" table:formula="of:=[.E10]" office:value-type="float" office:value="116426.673626667" calcext:value-type="float">
            <text:p><text:s/>116,426.67 </text:p>
          </table:table-cell>
          <table:table-cell table:style-name="ce342" table:formula="of:=[.F10]" office:value-type="float" office:value="116426.673626667" calcext:value-type="float">
            <text:p><text:s/>116,426.67 </text:p>
          </table:table-cell>
          <table:table-cell table:number-columns-repeated="16371"/>
        </table:table-row>
        <table:table-row table:style-name="ro42">
          <table:table-cell table:number-columns-repeated="7"/>
          <table:table-cell table:style-name="ce337" office:value-type="string" calcext:value-type="string">
            <text:p>GASTOS DE VENTA</text:p>
          </table:table-cell>
          <table:table-cell table:style-name="ce342" table:formula="of:=[.B13]" office:value-type="float" office:value="3139" calcext:value-type="float">
            <text:p><text:s/>3,139.00 </text:p>
          </table:table-cell>
          <table:table-cell table:style-name="ce342" table:formula="of:=[.C13]" office:value-type="float" office:value="3139" calcext:value-type="float">
            <text:p><text:s/>3,139.00 </text:p>
          </table:table-cell>
          <table:table-cell table:style-name="ce342" table:formula="of:=[.D13]" office:value-type="float" office:value="3139" calcext:value-type="float">
            <text:p><text:s/>3,139.00 </text:p>
          </table:table-cell>
          <table:table-cell table:style-name="ce342" table:formula="of:=[.E13]" office:value-type="float" office:value="3139" calcext:value-type="float">
            <text:p><text:s/>3,139.00 </text:p>
          </table:table-cell>
          <table:table-cell table:style-name="ce342" table:formula="of:=[.F13]" office:value-type="float" office:value="3139" calcext:value-type="float">
            <text:p><text:s/>3,139.00 </text:p>
          </table:table-cell>
          <table:table-cell table:number-columns-repeated="16371"/>
        </table:table-row>
        <table:table-row table:style-name="ro42">
          <table:table-cell table:style-name="ce697" table:number-columns-repeated="7"/>
          <table:table-cell table:style-name="ce347" office:value-type="string" calcext:value-type="string">
            <text:p>COSTOS TOTALES</text:p>
          </table:table-cell>
          <table:table-cell table:style-name="ce343" table:formula="of:=[.I29]+[.I33]" office:value-type="float" office:value="65084.8085004154" calcext:value-type="float">
            <text:p><text:s/>65,084.81 </text:p>
          </table:table-cell>
          <table:table-cell table:style-name="ce343" table:formula="of:=[.J29]+[.J33]" office:value-type="float" office:value="130715.538033446" calcext:value-type="float">
            <text:p><text:s/>130,715.54 </text:p>
          </table:table-cell>
          <table:table-cell table:style-name="ce343" table:formula="of:=[.K29]+[.K33]" office:value-type="float" office:value="130715.538033446" calcext:value-type="float">
            <text:p><text:s/>130,715.54 </text:p>
          </table:table-cell>
          <table:table-cell table:style-name="ce343" table:formula="of:=[.L29]+[.L33]" office:value-type="float" office:value="130715.538033446" calcext:value-type="float">
            <text:p><text:s/>130,715.54 </text:p>
          </table:table-cell>
          <table:table-cell table:style-name="ce343" table:formula="of:=[.M29]+[.M33]" office:value-type="float" office:value="130715.538033446" calcext:value-type="float">
            <text:p><text:s/>130,715.54 </text:p>
          </table:table-cell>
          <table:table-cell table:style-name="ce697" table:number-columns-repeated="16371"/>
        </table:table-row>
        <table:table-row table:style-name="ro42">
          <table:table-cell table:number-columns-repeated="7"/>
          <table:table-cell table:style-name="ce337" office:value-type="string" calcext:value-type="string">
            <text:p>VENTAS <text:s/>PROMEDIO (Q)</text:p>
          </table:table-cell>
          <table:table-cell table:style-name="ce342" table:formula="of:=[$INGRESOS.B13]" office:value-type="float" office:value="3185.70442141921" calcext:value-type="float">
            <text:p><text:s/>3,185.70 </text:p>
          </table:table-cell>
          <table:table-cell table:style-name="ce342" table:formula="of:=[$INGRESOS.C13]" office:value-type="float" office:value="11443.696" calcext:value-type="float">
            <text:p><text:s/>11,443.70 </text:p>
          </table:table-cell>
          <table:table-cell table:style-name="ce342" table:formula="of:=[$INGRESOS.D13]" office:value-type="float" office:value="11443.696" calcext:value-type="float">
            <text:p><text:s/>11,443.70 </text:p>
          </table:table-cell>
          <table:table-cell table:style-name="ce342" table:formula="of:=[$INGRESOS.E13]" office:value-type="float" office:value="11443.696" calcext:value-type="float">
            <text:p><text:s/>11,443.70 </text:p>
          </table:table-cell>
          <table:table-cell table:style-name="ce342" table:formula="of:=[$INGRESOS.F13]" office:value-type="float" office:value="11443.696" calcext:value-type="float">
            <text:p><text:s/>11,443.70 </text:p>
          </table:table-cell>
          <table:table-cell table:style-name="ce697" office:value-type="string" calcext:value-type="string">
            <text:p>vt</text:p>
          </table:table-cell>
          <table:table-cell table:number-columns-repeated="16370"/>
        </table:table-row>
        <table:table-row table:style-name="ro42">
          <table:table-cell table:number-columns-repeated="7"/>
          <table:table-cell table:style-name="ce337" office:value-type="string" calcext:value-type="string">
            <text:p>COSTO VARIABLE UNITARIO (CVu)</text:p>
          </table:table-cell>
          <table:table-cell table:style-name="ce715" table:formula="of:=[.I33]/[.I37]" office:value-type="float" office:value="15.2387277313306" calcext:value-type="float">
            <text:p><text:s/>15.239 </text:p>
          </table:table-cell>
          <table:table-cell table:style-name="ce342" table:formula="of:=[.J33]/[.J37]" office:value-type="float" office:value="10.4481693350353" calcext:value-type="float">
            <text:p><text:s/>10.45 </text:p>
          </table:table-cell>
          <table:table-cell table:style-name="ce342" table:formula="of:=[.K33]/[.K37]" office:value-type="float" office:value="10.4481693350353" calcext:value-type="float">
            <text:p><text:s/>10.45 </text:p>
          </table:table-cell>
          <table:table-cell table:style-name="ce342" table:formula="of:=[.L33]/[.L37]" office:value-type="float" office:value="10.4481693350353" calcext:value-type="float">
            <text:p><text:s/>10.45 </text:p>
          </table:table-cell>
          <table:table-cell table:style-name="ce342" table:formula="of:=[.M33]/[.M37]" office:value-type="float" office:value="10.4481693350353" calcext:value-type="float">
            <text:p><text:s/>10.45 </text:p>
          </table:table-cell>
          <table:table-cell table:number-columns-repeated="16371"/>
        </table:table-row>
        <table:table-row table:style-name="ro42">
          <table:table-cell table:number-columns-repeated="7"/>
          <table:table-cell table:style-name="ce337" office:value-type="string" calcext:value-type="string">
            <text:p>PRECIO DE VENTA UNITARIO</text:p>
          </table:table-cell>
          <table:table-cell table:style-name="ce342" table:formula="of:=[$INGRESOS.B10]" office:value-type="float" office:value="18" calcext:value-type="float">
            <text:p><text:s/>18.00 </text:p>
          </table:table-cell>
          <table:table-cell table:style-name="ce342" table:formula="of:=[$INGRESOS.C10]" office:value-type="float" office:value="18" calcext:value-type="float">
            <text:p><text:s/>18.00 </text:p>
          </table:table-cell>
          <table:table-cell table:style-name="ce342" table:formula="of:=[$INGRESOS.D10]" office:value-type="float" office:value="18" calcext:value-type="float">
            <text:p><text:s/>18.00 </text:p>
          </table:table-cell>
          <table:table-cell table:style-name="ce342" table:formula="of:=[$INGRESOS.E10]" office:value-type="float" office:value="18" calcext:value-type="float">
            <text:p><text:s/>18.00 </text:p>
          </table:table-cell>
          <table:table-cell table:style-name="ce342" table:formula="of:=[$INGRESOS.F10]" office:value-type="float" office:value="18" calcext:value-type="float">
            <text:p><text:s/>18.00 </text:p>
          </table:table-cell>
          <table:table-cell table:number-columns-repeated="16371"/>
        </table:table-row>
        <table:table-row table:style-name="ro42">
          <table:table-cell table:style-name="ce697" table:number-columns-repeated="7"/>
          <table:table-cell table:style-name="ce347" office:value-type="string" calcext:value-type="string">
            <text:p>PUNTO DE EQUILIBRIO (Q)</text:p>
          </table:table-cell>
          <table:table-cell table:style-name="ce343" table:formula="of:=[.I29]/([.I39]-[.I38])" office:value-type="float" office:value="5989.53112214522" calcext:value-type="float">
            <text:p><text:s/>5,989.53 </text:p>
          </table:table-cell>
          <table:table-cell table:style-name="ce343" table:formula="of:=[.J29]/([.J39]-[.J38])" office:value-type="float" office:value="1476.44523578997" calcext:value-type="float">
            <text:p><text:s/>1,476.45 </text:p>
          </table:table-cell>
          <table:table-cell table:style-name="ce343" table:formula="of:=[.K29]/([.K39]-[.K38])" office:value-type="float" office:value="1476.44523578997" calcext:value-type="float">
            <text:p><text:s/>1,476.45 </text:p>
          </table:table-cell>
          <table:table-cell table:style-name="ce343" table:formula="of:=[.L29]/([.L39]-[.L38])" office:value-type="float" office:value="1476.44523578997" calcext:value-type="float">
            <text:p><text:s/>1,476.45 </text:p>
          </table:table-cell>
          <table:table-cell table:style-name="ce343" table:formula="of:=[.M29]/([.M39]-[.M38])" office:value-type="float" office:value="1476.44523578997" calcext:value-type="float">
            <text:p><text:s/>1,476.45 </text:p>
          </table:table-cell>
          <table:table-cell table:style-name="ce697" table:number-columns-repeated="16371"/>
        </table:table-row>
        <table:table-row table:style-name="ro42">
          <table:table-cell table:style-name="ce697" table:number-columns-repeated="7"/>
          <table:table-cell table:style-name="ce347" office:value-type="string" calcext:value-type="string">
            <text:p>PUNTO DE EQUILIBRIO (S/.)</text:p>
          </table:table-cell>
          <table:table-cell table:style-name="ce343" table:formula="of:=[.I40]*[.I39]" office:value-type="float" office:value="107811.560198614" calcext:value-type="float">
            <text:p><text:s/>107,811.56 </text:p>
          </table:table-cell>
          <table:table-cell table:style-name="ce343" table:formula="of:=[.J40]*[.J39]" office:value-type="float" office:value="26576.0142442195" calcext:value-type="float">
            <text:p><text:s/>26,576.01 </text:p>
          </table:table-cell>
          <table:table-cell table:style-name="ce343" table:formula="of:=[.K40]*[.K39]" office:value-type="float" office:value="26576.0142442195" calcext:value-type="float">
            <text:p><text:s/>26,576.01 </text:p>
          </table:table-cell>
          <table:table-cell table:style-name="ce343" table:formula="of:=[.L40]*[.L39]" office:value-type="float" office:value="26576.0142442195" calcext:value-type="float">
            <text:p><text:s/>26,576.01 </text:p>
          </table:table-cell>
          <table:table-cell table:style-name="ce343" table:formula="of:=[.M40]*[.M39]" office:value-type="float" office:value="26576.0142442195" calcext:value-type="float">
            <text:p><text:s/>26,576.01 </text:p>
          </table:table-cell>
          <table:table-cell table:style-name="ce697" table:number-columns-repeated="16371"/>
        </table:table-row>
        <table:table-row table:style-name="ro26">
          <table:table-cell table:number-columns-repeated="7"/>
          <table:table-cell table:style-name="ce697" office:value-type="string" calcext:value-type="string">
            <text:p>FUENTE: ELABORACION PROPIA</text:p>
          </table:table-cell>
          <table:table-cell table:number-columns-repeated="16376"/>
        </table:table-row>
        <table:table-row table:style-name="ro26">
          <table:table-cell table:number-columns-repeated="16384"/>
        </table:table-row>
        <table:table-row table:style-name="ro26">
          <table:table-cell table:number-columns-repeated="8"/>
          <table:table-cell table:style-name="ce699" office:value-type="string" calcext:value-type="string">
            <text:p>PE(Q) = CF/(Pu-Cvu)</text:p>
          </table:table-cell>
          <table:table-cell/>
          <table:table-cell table:style-name="ce719" table:number-columns-repeated="4"/>
          <table:table-cell table:number-columns-repeated="16370"/>
        </table:table-row>
        <table:table-row table:style-name="ro26">
          <table:table-cell table:number-columns-repeated="6"/>
          <table:table-cell table:style-name="ce708" table:formula="of:=+[.I29]" office:value-type="float" office:value="16538.7261899122" calcext:value-type="float">
            <text:p><text:s/>16,538.72619 </text:p>
          </table:table-cell>
          <table:table-cell table:style-name="ce712" table:formula="of:=+[.I29]" office:value-type="float" office:value="16538.7261899122" calcext:value-type="float">
            <text:p><text:s/>16,538.7262 </text:p>
          </table:table-cell>
          <table:table-cell table:style-name="ce697" table:number-columns-repeated="2"/>
          <table:table-cell table:style-name="ce719"/>
          <table:table-cell table:number-columns-repeated="16373"/>
        </table:table-row>
        <table:table-row table:style-name="ro26">
          <table:table-cell table:number-columns-repeated="6"/>
          <table:table-cell table:style-name="ce708"/>
          <table:table-cell table:style-name="ce712" table:formula="of:=+[.I39]*[.I37]" office:value-type="float" office:value="57342.6795855458" calcext:value-type="float">
            <text:p><text:s/>57,342.6796 </text:p>
          </table:table-cell>
          <table:table-cell table:number-columns-repeated="16376"/>
        </table:table-row>
        <table:table-row table:style-name="ro26">
          <table:table-cell table:number-columns-repeated="6"/>
          <table:table-cell table:style-name="ce708" table:formula="of:=+[.I38]" office:value-type="float" office:value="15.2387277313306" calcext:value-type="float">
            <text:p><text:s/>15.23873 </text:p>
          </table:table-cell>
          <table:table-cell table:style-name="ce708" table:formula="of:=+[.I33]" office:value-type="float" office:value="48546.0823105033" calcext:value-type="float">
            <text:p><text:s/>48,546.08231 </text:p>
          </table:table-cell>
          <table:table-cell office:value-type="string" calcext:value-type="string">
            <text:p>PE (S/.) = CF/(1-CV/VENTAS)</text:p>
          </table:table-cell>
          <table:table-cell/>
          <table:table-cell table:style-name="ce720" table:formula="of:=[.I29]/(1-[.I33]/[.B7])" office:value-type="float" office:value="107811.560198614" calcext:value-type="float">
            <text:p>107811.56</text:p>
          </table:table-cell>
          <table:table-cell table:style-name="ce720" table:formula="of:=[.J29]/(1-[.J33]/[.C7])" office:value-type="float" office:value="26576.0142442195" calcext:value-type="float">
            <text:p>26576.01</text:p>
          </table:table-cell>
          <table:table-cell table:style-name="ce720" table:formula="of:=[.K29]/(1-[.K33]/[.D7])" office:value-type="float" office:value="26576.0142442195" calcext:value-type="float">
            <text:p>26576.01</text:p>
          </table:table-cell>
          <table:table-cell table:style-name="ce720" table:formula="of:=[.L29]/(1-[.L33]/[.E7])" office:value-type="float" office:value="26576.0142442195" calcext:value-type="float">
            <text:p>26576.01</text:p>
          </table:table-cell>
          <table:table-cell table:number-columns-repeated="16370"/>
        </table:table-row>
        <table:table-row table:style-name="ro26">
          <table:table-cell table:number-columns-repeated="6"/>
          <table:table-cell table:style-name="ce709" table:formula="of:=[.G45]/([.I39]-[.G47])" office:value-type="float" office:value="5989.53112214522" calcext:value-type="float">
            <text:p><text:s/>5,989.53 </text:p>
          </table:table-cell>
          <table:table-cell table:style-name="ce709" table:formula="of:=[.H45]/(1-[.H47]/[.H46])" office:value-type="float" office:value="107811.560198614" calcext:value-type="float">
            <text:p><text:s/>107,811.56 </text:p>
          </table:table-cell>
          <table:table-cell table:style-name="ce697" table:number-columns-repeated="2"/>
          <table:table-cell table:style-name="ce709"/>
          <table:table-cell table:number-columns-repeated="16373"/>
        </table:table-row>
        <table:table-row table:style-name="ro26">
          <table:table-cell table:number-columns-repeated="10"/>
          <table:table-cell table:style-name="ce709"/>
          <table:table-cell table:number-columns-repeated="16373"/>
        </table:table-row>
        <table:table-row table:style-name="ro26">
          <table:table-cell table:number-columns-repeated="16384"/>
        </table:table-row>
        <table:table-row table:style-name="ro14">
          <table:table-cell table:number-columns-repeated="8"/>
          <table:table-cell table:style-name="ce429" office:value-type="string" calcext:value-type="string" table:number-columns-spanned="1" table:number-rows-spanned="2">
            <text:p>RUBROS</text:p>
          </table:table-cell>
          <table:table-cell table:style-name="ce429" office:value-type="string" calcext:value-type="string" table:number-columns-spanned="5" table:number-rows-spanned="1">
            <text:p>AÑOS</text:p>
          </table:table-cell>
          <table:covered-table-cell table:number-columns-repeated="3" table:style-name="ce703"/>
          <table:covered-table-cell table:style-name="ce705"/>
          <table:table-cell table:number-columns-repeated="16370"/>
        </table:table-row>
        <table:table-row table:style-name="ro26">
          <table:table-cell table:number-columns-repeated="8"/>
          <table:covered-table-cell table:style-name="ce429"/>
          <table:table-cell table:style-name="ce429" office:value-type="float" office:value="1" calcext:value-type="float">
            <text:p>1</text:p>
          </table:table-cell>
          <table:table-cell table:style-name="ce429" office:value-type="float" office:value="2" calcext:value-type="float">
            <text:p>2</text:p>
          </table:table-cell>
          <table:table-cell table:style-name="ce429" office:value-type="float" office:value="3" calcext:value-type="float">
            <text:p>3</text:p>
          </table:table-cell>
          <table:table-cell table:style-name="ce429" office:value-type="float" office:value="4" calcext:value-type="float">
            <text:p>4</text:p>
          </table:table-cell>
          <table:table-cell table:style-name="ce429" office:value-type="float" office:value="5" calcext:value-type="float">
            <text:p>5</text:p>
          </table:table-cell>
          <table:table-cell table:number-columns-repeated="16370"/>
        </table:table-row>
        <table:table-row table:style-name="ro26">
          <table:table-cell table:number-columns-repeated="8"/>
          <table:table-cell table:style-name="ce716" office:value-type="string" calcext:value-type="string">
            <text:p>VENTAS</text:p>
          </table:table-cell>
          <table:table-cell table:style-name="ce232" table:formula="of:=[.B7]" office:value-type="float" office:value="57342.6795855458" calcext:value-type="float">
            <text:p><text:s/>57,342.68 </text:p>
          </table:table-cell>
          <table:table-cell table:style-name="ce232" table:formula="of:=[.J53]+[.C7]" office:value-type="float" office:value="263329.207585546" calcext:value-type="float">
            <text:p><text:s/>263,329.21 </text:p>
          </table:table-cell>
          <table:table-cell table:style-name="ce232" table:formula="of:=[.K53]+[.D7]" office:value-type="float" office:value="469315.735585546" calcext:value-type="float">
            <text:p><text:s/>469,315.74 </text:p>
          </table:table-cell>
          <table:table-cell table:style-name="ce232" table:formula="of:=[.L53]+[.E7]" office:value-type="float" office:value="675302.263585546" calcext:value-type="float">
            <text:p><text:s/>675,302.26 </text:p>
          </table:table-cell>
          <table:table-cell table:style-name="ce232" table:formula="of:=[.M53]+[.F7]" office:value-type="float" office:value="950705.469551648" calcext:value-type="float">
            <text:p><text:s/>950,705.47 </text:p>
          </table:table-cell>
          <table:table-cell table:number-columns-repeated="16370"/>
        </table:table-row>
        <table:table-row table:style-name="ro43">
          <table:table-cell table:style-name="ce220" table:number-columns-repeated="8"/>
          <table:table-cell table:style-name="ce717" office:value-type="string" calcext:value-type="string">
            <text:p>COSTOS TOTALES <text:s/>ACUMULADOS</text:p>
          </table:table-cell>
          <table:table-cell table:style-name="ce238" table:formula="of:=[.B25]+[.I36]" office:value-type="float" office:value="205143.373885939" calcext:value-type="float">
            <text:p><text:s/>205,143.37 </text:p>
          </table:table-cell>
          <table:table-cell table:style-name="ce232" table:formula="of:=[.J54]+[.J36]" office:value-type="float" office:value="335858.911919385" calcext:value-type="float">
            <text:p><text:s/>335,858.91 </text:p>
          </table:table-cell>
          <table:table-cell table:style-name="ce232" table:formula="of:=[.K54]+[.K36]" office:value-type="float" office:value="466574.449952831" calcext:value-type="float">
            <text:p><text:s/>466,574.45 </text:p>
          </table:table-cell>
          <table:table-cell table:style-name="ce232" table:formula="of:=[.L54]+[.L36]" office:value-type="float" office:value="597289.987986278" calcext:value-type="float">
            <text:p><text:s/>597,289.99 </text:p>
          </table:table-cell>
          <table:table-cell table:style-name="ce232" table:formula="of:=[.M54]+[.M36]" office:value-type="float" office:value="728005.526019724" calcext:value-type="float">
            <text:p><text:s/>728,005.53 </text:p>
          </table:table-cell>
          <table:table-cell table:style-name="ce220" table:number-columns-repeated="16370"/>
        </table:table-row>
        <table:table-row table:style-name="ro26">
          <table:table-cell table:number-columns-repeated="8"/>
          <table:table-cell table:style-name="ce716" office:value-type="string" calcext:value-type="string">
            <text:p>COSTOS FIJOS</text:p>
          </table:table-cell>
          <table:table-cell table:style-name="ce232" table:formula="of:=[.I29]" office:value-type="float" office:value="16538.7261899122" calcext:value-type="float">
            <text:p><text:s/>16,538.73 </text:p>
          </table:table-cell>
          <table:table-cell table:style-name="ce232" table:formula="of:=[.J29]" office:value-type="float" office:value="11149.8644067797" calcext:value-type="float">
            <text:p><text:s/>11,149.86 </text:p>
          </table:table-cell>
          <table:table-cell table:style-name="ce232" table:formula="of:=[.K29]" office:value-type="float" office:value="11149.8644067797" calcext:value-type="float">
            <text:p><text:s/>11,149.86 </text:p>
          </table:table-cell>
          <table:table-cell table:style-name="ce232" table:formula="of:=[.L29]" office:value-type="float" office:value="11149.8644067797" calcext:value-type="float">
            <text:p><text:s/>11,149.86 </text:p>
          </table:table-cell>
          <table:table-cell table:style-name="ce232" table:formula="of:=[.M29]" office:value-type="float" office:value="11149.8644067797" calcext:value-type="float">
            <text:p><text:s/>11,149.86 </text:p>
          </table:table-cell>
          <table:table-cell table:number-columns-repeated="16370"/>
        </table:table-row>
        <table:table-row table:style-name="ro26">
          <table:table-cell table:number-columns-repeated="8"/>
          <table:table-cell>
            <draw:frame table:end-cell-address="'ESTADO GyP'.N80" table:end-x="2.75cm" table:end-y="0.211cm" draw:z-index="0" draw:name="Gráfico 1" draw:style-name="gr1" draw:text-style-name="P1" svg:width="14.059cm" svg:height="10.265cm" svg:x="0.661cm" svg:y="0.106cm">
              <draw:object draw:notify-on-update-of-ranges="'ESTADO GyP'.I53:'ESTADO GyP'.I53 'ESTADO GyP'.J53:'ESTADO GyP'.N53 'ESTADO GyP'.I54:'ESTADO GyP'.I54 'ESTADO GyP'.J54:'ESTADO GyP'.N54 'ESTADO GyP'.I55:'ESTADO GyP'.I55 'ESTADO GyP'.J55:'ESTADO GyP'.N55" xlink:href="./Object 3" xlink:type="simple" xlink:show="embed" xlink:actuate="onLoad">
                <loext:p/>
              </draw:object>
              <draw:image xlink:href="./ObjectReplacements/Object 3" xlink:type="simple" xlink:show="embed" xlink:actuate="onLoad"/>
            </draw:frame>
          </table:table-cell>
          <table:table-cell table:number-columns-repeated="16375"/>
        </table:table-row>
        <table:table-row table:style-name="ro26" table:number-rows-repeated="3">
          <table:table-cell table:number-columns-repeated="16384"/>
        </table:table-row>
        <table:table-row table:style-name="ro26">
          <table:table-cell table:number-columns-repeated="7"/>
          <table:table-cell table:style-name="ce709"/>
          <table:table-cell table:number-columns-repeated="16376"/>
        </table:table-row>
        <table:table-row table:style-name="ro26" table:number-rows-repeated="1048515">
          <table:table-cell table:number-columns-repeated="16384"/>
        </table:table-row>
        <table:table-row table:style-name="ro26">
          <table:table-cell table:number-columns-repeated="16384"/>
        </table:table-row>
        <table:named-expressions>
          <table:named-range table:name="_xlnm.Print_Area" table:base-cell-address="$POBLACION.$A$1" table:cell-range-address="$'ESTADO GyP'.$A$4:.$N$80" table:range-usable-as="print-range"/>
        </table:named-expressions>
      </table:table>
      <table:table table:name="FLUJO DE CAJA " table:style-name="ta20" table:print-ranges="'FLUJO DE CAJA '.A6:'FLUJO DE CAJA '.G51">
        <table:table-column table:style-name="co103" table:default-cell-style-name="Default"/>
        <table:table-column table:style-name="co5" table:default-cell-style-name="ce728"/>
        <table:table-column table:style-name="co8" table:default-cell-style-name="Default"/>
        <table:table-column table:style-name="co51" table:number-columns-repeated="4" table:default-cell-style-name="Default"/>
        <table:table-column table:style-name="co96" table:default-cell-style-name="Default"/>
        <table:table-column table:style-name="co104" table:default-cell-style-name="Default"/>
        <table:table-column table:style-name="co14" table:default-cell-style-name="Default"/>
        <table:table-column table:style-name="co86" table:number-columns-repeated="4" table:default-cell-style-name="Default"/>
        <table:table-column table:style-name="co10" table:default-cell-style-name="Default"/>
        <table:table-column table:style-name="co96" table:number-columns-repeated="16369" table:default-cell-style-name="Default"/>
        <table:table-row table:style-name="ro1" table:number-rows-repeated="4">
          <table:table-cell table:number-columns-repeated="16384"/>
        </table:table-row>
        <table:table-row table:style-name="ro1">
          <table:table-cell table:number-columns-repeated="8"/>
          <table:table-cell table:style-name="ce767" office:value-type="string" calcext:value-type="string">
            <text:p>otra forma calculando el NOPAT</text:p>
          </table:table-cell>
          <table:table-cell table:number-columns-repeated="16375"/>
        </table:table-row>
        <table:table-row table:style-name="ro21">
          <table:table-cell table:style-name="ce721" office:value-type="string" calcext:value-type="string" table:number-columns-spanned="7" table:number-rows-spanned="1">
            <text:p>FLUJO DE CAJA ECONÓMICO Y FINANCIERO</text:p>
          </table:table-cell>
          <table:covered-table-cell table:number-columns-repeated="6" table:style-name="ce729"/>
          <table:table-cell table:number-columns-repeated="2"/>
          <table:table-cell table:style-name="ce388" office:value-type="string" calcext:value-type="string" table:number-columns-spanned="6" table:number-rows-spanned="1">
            <text:p>AÑOS</text:p>
          </table:table-cell>
          <table:covered-table-cell table:number-columns-repeated="5" table:style-name="ce388"/>
          <table:table-cell table:number-columns-repeated="16369"/>
        </table:table-row>
        <table:table-row table:style-name="ro44">
          <table:table-cell table:style-name="ce644" office:value-type="string" calcext:value-type="string" table:number-columns-spanned="7" table:number-rows-spanned="1">
            <text:p>FLUJO DE CAJA ECONOMICO Y FINANCIERO</text:p>
          </table:table-cell>
          <table:covered-table-cell table:number-columns-repeated="6" table:style-name="ce644"/>
          <table:table-cell/>
          <table:table-cell table:style-name="ce768" office:value-type="string" calcext:value-type="string">
            <text:p>CONCEPTO</text:p>
          </table:table-cell>
          <table:table-cell table:style-name="ce768" office:value-type="float" office:value="0" calcext:value-type="float">
            <text:p>0</text:p>
          </table:table-cell>
          <table:table-cell table:style-name="ce768" office:value-type="float" office:value="1" calcext:value-type="float">
            <text:p>1</text:p>
          </table:table-cell>
          <table:table-cell table:style-name="ce768" office:value-type="float" office:value="2" calcext:value-type="float">
            <text:p>2</text:p>
          </table:table-cell>
          <table:table-cell table:style-name="ce768" office:value-type="float" office:value="3" calcext:value-type="float">
            <text:p>3</text:p>
          </table:table-cell>
          <table:table-cell table:style-name="ce768" office:value-type="float" office:value="4" calcext:value-type="float">
            <text:p>4</text:p>
          </table:table-cell>
          <table:table-cell table:style-name="ce768" office:value-type="float" office:value="5" calcext:value-type="float">
            <text:p>5</text:p>
          </table:table-cell>
          <table:table-cell table:number-columns-repeated="16369"/>
        </table:table-row>
        <table:table-row table:style-name="ro45">
          <table:table-cell table:style-name="ce722" office:value-type="string" calcext:value-type="string">
            <text:p>CONCEPTO</text:p>
          </table:table-cell>
          <table:table-cell table:style-name="ce730" office:value-type="float" office:value="0" calcext:value-type="float">
            <text:p>0</text:p>
          </table:table-cell>
          <table:table-cell table:style-name="ce722" office:value-type="float" office:value="1" calcext:value-type="float">
            <text:p>1</text:p>
          </table:table-cell>
          <table:table-cell table:style-name="ce722" office:value-type="float" office:value="2" calcext:value-type="float">
            <text:p>2</text:p>
          </table:table-cell>
          <table:table-cell table:style-name="ce722" office:value-type="float" office:value="3" calcext:value-type="float">
            <text:p>3</text:p>
          </table:table-cell>
          <table:table-cell table:style-name="ce722" office:value-type="float" office:value="4" calcext:value-type="float">
            <text:p>4</text:p>
          </table:table-cell>
          <table:table-cell table:style-name="ce722" office:value-type="float" office:value="5" calcext:value-type="float">
            <text:p>5</text:p>
          </table:table-cell>
          <table:table-cell/>
          <table:table-cell table:style-name="ce726" office:value-type="string" calcext:value-type="string">
            <text:p>Utilidad Operativa</text:p>
          </table:table-cell>
          <table:table-cell table:style-name="ce519" office:value-type="float" office:value="0" calcext:value-type="float">
            <text:p>0</text:p>
          </table:table-cell>
          <table:table-cell table:style-name="ce522" table:formula="of:=[$'ESTADO GyP'.B16]" office:value-type="float" office:value="-2353.26713173716" calcext:value-type="float">
            <text:p><text:s/>(2,353.27)</text:p>
          </table:table-cell>
          <table:table-cell table:style-name="ce522" table:formula="of:=[$'ESTADO GyP'.C16]" office:value-type="float" office:value="75270.9899665537" calcext:value-type="float">
            <text:p><text:s/>75,270.99 </text:p>
          </table:table-cell>
          <table:table-cell table:style-name="ce522" table:formula="of:=[$'ESTADO GyP'.D16]" office:value-type="float" office:value="75270.9899665537" calcext:value-type="float">
            <text:p><text:s/>75,270.99 </text:p>
          </table:table-cell>
          <table:table-cell table:style-name="ce522" table:formula="of:=[$'ESTADO GyP'.E16]" office:value-type="float" office:value="75270.9899665537" calcext:value-type="float">
            <text:p><text:s/>75,270.99 </text:p>
          </table:table-cell>
          <table:table-cell table:style-name="ce522" table:formula="of:=[$'ESTADO GyP'.F16]" office:value-type="float" office:value="144687.667932655" calcext:value-type="float">
            <text:p><text:s/>144,687.67 </text:p>
          </table:table-cell>
          <table:table-cell table:style-name="ce519"/>
          <table:table-cell table:number-columns-repeated="16368"/>
        </table:table-row>
        <table:table-row table:style-name="ro1">
          <table:table-cell table:style-name="ce645" office:value-type="string" calcext:value-type="string">
            <text:p>I. INGRESOS</text:p>
          </table:table-cell>
          <table:table-cell table:style-name="ce731" table:formula="of:=SUM([.B10:.B11])" office:value-type="float" office:value="0" calcext:value-type="float">
            <text:p><text:s/>- <text:s text:c="2"/></text:p>
          </table:table-cell>
          <table:table-cell table:style-name="ce520" table:formula="of:=SUM([.C10:.C11])" office:value-type="float" office:value="57342.6795855458" calcext:value-type="float">
            <text:p><text:s/>57,342.68 </text:p>
          </table:table-cell>
          <table:table-cell table:style-name="ce520" table:formula="of:=SUM([.D10:.D11])" office:value-type="float" office:value="205986.528" calcext:value-type="float">
            <text:p><text:s/>205,986.53 </text:p>
          </table:table-cell>
          <table:table-cell table:style-name="ce520" table:formula="of:=SUM([.E10:.E11])" office:value-type="float" office:value="205986.528" calcext:value-type="float">
            <text:p><text:s/>205,986.53 </text:p>
          </table:table-cell>
          <table:table-cell table:style-name="ce520" table:formula="of:=SUM([.F10:.F11])" office:value-type="float" office:value="205986.528" calcext:value-type="float">
            <text:p><text:s/>205,986.53 </text:p>
          </table:table-cell>
          <table:table-cell table:style-name="ce520" table:formula="of:=SUM([.G10:.G12])" office:value-type="float" office:value="355073.761064095" calcext:value-type="float">
            <text:p><text:s/>355,073.76 </text:p>
          </table:table-cell>
          <table:table-cell table:style-name="ce519"/>
          <table:table-cell table:style-name="ce726" office:value-type="string" calcext:value-type="string">
            <text:p>Ingresos Extraordinarios</text:p>
          </table:table-cell>
          <table:table-cell table:style-name="ce519"/>
          <table:table-cell table:style-name="ce522" table:number-columns-repeated="4"/>
          <table:table-cell table:style-name="ce522" table:formula="of:=[.G11]" office:value-type="float" office:value="69416.6779661017" calcext:value-type="float">
            <text:p><text:s/>69,416.68 </text:p>
          </table:table-cell>
          <table:table-cell table:style-name="ce519" table:number-columns-repeated="12"/>
          <table:table-cell table:number-columns-repeated="16357"/>
        </table:table-row>
        <table:table-row table:style-name="ro1">
          <table:table-cell table:style-name="ce656" office:value-type="string" calcext:value-type="string">
            <text:p><text:s/>INGRESOS POR VENTA</text:p>
          </table:table-cell>
          <table:table-cell table:style-name="ce732"/>
          <table:table-cell table:style-name="ce521" table:formula="of:=[$'ESTADO GyP'.B7]" office:value-type="float" office:value="57342.6795855458" calcext:value-type="float">
            <text:p><text:s/>57,342.68 </text:p>
          </table:table-cell>
          <table:table-cell table:style-name="ce521" table:formula="of:=[$'ESTADO GyP'.C7]" office:value-type="float" office:value="205986.528" calcext:value-type="float">
            <text:p><text:s/>205,986.53 </text:p>
          </table:table-cell>
          <table:table-cell table:style-name="ce521" table:formula="of:=[$'ESTADO GyP'.D7]" office:value-type="float" office:value="205986.528" calcext:value-type="float">
            <text:p><text:s/>205,986.53 </text:p>
          </table:table-cell>
          <table:table-cell table:style-name="ce521" table:formula="of:=[$'ESTADO GyP'.E7]" office:value-type="float" office:value="205986.528" calcext:value-type="float">
            <text:p><text:s/>205,986.53 </text:p>
          </table:table-cell>
          <table:table-cell table:style-name="ce521" table:formula="of:=[$'ESTADO GyP'.F7]" office:value-type="float" office:value="275403.205966102" calcext:value-type="float">
            <text:p><text:s/>275,403.21 </text:p>
          </table:table-cell>
          <table:table-cell table:style-name="ce519"/>
          <table:table-cell table:style-name="ce726" office:value-type="string" calcext:value-type="string">
            <text:p>Impuesto a la Renta</text:p>
          </table:table-cell>
          <table:table-cell table:style-name="ce519"/>
          <table:table-cell table:style-name="ce522" table:formula="of:=-[$'ESTADO GyP'.B17]" office:value-type="float" office:value="705.980139521147" calcext:value-type="float">
            <text:p><text:s/>705.98 </text:p>
          </table:table-cell>
          <table:table-cell table:style-name="ce522" table:formula="of:=-[$'ESTADO GyP'.C17]" office:value-type="float" office:value="-22581.2969899661" calcext:value-type="float">
            <text:p><text:s/>(22,581.30)</text:p>
          </table:table-cell>
          <table:table-cell table:style-name="ce522" table:formula="of:=-[$'ESTADO GyP'.D17]" office:value-type="float" office:value="-22581.2969899661" calcext:value-type="float">
            <text:p><text:s/>(22,581.30)</text:p>
          </table:table-cell>
          <table:table-cell table:style-name="ce522" table:formula="of:=-[$'ESTADO GyP'.E17]" office:value-type="float" office:value="-22581.2969899661" calcext:value-type="float">
            <text:p><text:s/>(22,581.30)</text:p>
          </table:table-cell>
          <table:table-cell table:style-name="ce522" table:formula="of:=-[$'ESTADO GyP'.F17]" office:value-type="float" office:value="-43406.3003797966" calcext:value-type="float">
            <text:p><text:s/>(43,406.30)</text:p>
          </table:table-cell>
          <table:table-cell table:style-name="ce519" table:number-columns-repeated="12"/>
          <table:table-cell table:number-columns-repeated="16357"/>
        </table:table-row>
        <table:table-row table:style-name="ro1">
          <table:table-cell table:style-name="ce656" office:value-type="string" calcext:value-type="string">
            <text:p>VALOR RESIDUAL</text:p>
          </table:table-cell>
          <table:table-cell table:style-name="ce732"/>
          <table:table-cell table:style-name="ce521" table:number-columns-repeated="4"/>
          <table:table-cell table:style-name="ce521" table:formula="of:=[$'DEPRECIAC '.H16]" office:value-type="float" office:value="69416.6779661017" calcext:value-type="float">
            <text:p><text:s/>69,416.68 </text:p>
          </table:table-cell>
          <table:table-cell table:style-name="ce519"/>
          <table:table-cell table:style-name="ce769" office:value-type="string" calcext:value-type="string">
            <text:p>NOPAT</text:p>
          </table:table-cell>
          <table:table-cell table:style-name="ce771"/>
          <table:table-cell table:style-name="ce775" table:formula="of:=SUM([.K8:.K10])" office:value-type="float" office:value="-1647.28699221601" calcext:value-type="float">
            <text:p><text:s/>(1,647.29)</text:p>
          </table:table-cell>
          <table:table-cell table:style-name="ce775" table:formula="of:=SUM([.L8:.L10])" office:value-type="float" office:value="52689.6929765876" calcext:value-type="float">
            <text:p><text:s/>52,689.69 </text:p>
          </table:table-cell>
          <table:table-cell table:style-name="ce775" table:formula="of:=SUM([.M8:.M10])" office:value-type="float" office:value="52689.6929765876" calcext:value-type="float">
            <text:p><text:s/>52,689.69 </text:p>
          </table:table-cell>
          <table:table-cell table:style-name="ce775" table:formula="of:=SUM([.N8:.N10])" office:value-type="float" office:value="52689.6929765876" calcext:value-type="float">
            <text:p><text:s/>52,689.69 </text:p>
          </table:table-cell>
          <table:table-cell table:style-name="ce775" table:formula="of:=SUM([.O8:.O10])" office:value-type="float" office:value="170698.04551896" calcext:value-type="float">
            <text:p><text:s/>170,698.05 </text:p>
          </table:table-cell>
          <table:table-cell table:style-name="ce519" table:number-columns-repeated="12"/>
          <table:table-cell table:number-columns-repeated="16357"/>
        </table:table-row>
        <table:table-row table:style-name="ro1">
          <table:table-cell table:style-name="ce656" office:value-type="string" calcext:value-type="string">
            <text:p>RECUPERO CAPITAL DE TRABAJO</text:p>
          </table:table-cell>
          <table:table-cell table:style-name="ce732"/>
          <table:table-cell table:style-name="ce521" table:number-columns-repeated="4"/>
          <table:table-cell table:style-name="ce521" table:formula="of:=[.B20]-SUM([.C20:.G20])" office:value-type="float" office:value="10253.8771318918" calcext:value-type="float">
            <text:p><text:s/>10,253.88 </text:p>
          </table:table-cell>
          <table:table-cell table:style-name="ce519"/>
          <table:table-cell table:number-columns-repeated="7"/>
          <table:table-cell table:style-name="ce519" table:number-columns-repeated="12"/>
          <table:table-cell table:number-columns-repeated="16357"/>
        </table:table-row>
        <table:table-row table:style-name="ro1">
          <table:table-cell table:style-name="ce645" office:value-type="string" calcext:value-type="string">
            <text:p>II. EGRESOS</text:p>
          </table:table-cell>
          <table:table-cell table:style-name="ce731" table:formula="of:=-SUM([.B14:.B16])" office:value-type="float" office:value="0" calcext:value-type="float">
            <text:p><text:s/>- <text:s text:c="2"/></text:p>
          </table:table-cell>
          <table:table-cell table:style-name="ce520" table:formula="of:=SUM([.C14:.C20])" office:value-type="float" office:value="-50505.1887849319" calcext:value-type="float">
            <text:p><text:s/>(50,505.19)</text:p>
          </table:table-cell>
          <table:table-cell table:style-name="ce520" table:formula="of:=SUM([.D14:.D20])" office:value-type="float" office:value="-144975.474553373" calcext:value-type="float">
            <text:p><text:s/>(144,975.47)</text:p>
          </table:table-cell>
          <table:table-cell table:style-name="ce520" table:formula="of:=SUM([.E14:.E20])" office:value-type="float" office:value="-145171.57534072" calcext:value-type="float">
            <text:p><text:s/>(145,171.58)</text:p>
          </table:table-cell>
          <table:table-cell table:style-name="ce520" table:formula="of:=SUM([.F14:.F20])" office:value-type="float" office:value="-145406.896285538" calcext:value-type="float">
            <text:p><text:s/>(145,406.90)</text:p>
          </table:table-cell>
          <table:table-cell table:style-name="ce520" table:formula="of:=SUM([.G14:.G20])" office:value-type="float" office:value="-166514.28480915" calcext:value-type="float">
            <text:p><text:s/>(166,514.28)</text:p>
          </table:table-cell>
          <table:table-cell table:style-name="ce519"/>
          <table:table-cell table:number-columns-repeated="7"/>
          <table:table-cell table:style-name="ce519" table:number-columns-repeated="12"/>
          <table:table-cell table:number-columns-repeated="16357"/>
        </table:table-row>
        <table:table-row table:style-name="ro1">
          <table:table-cell table:style-name="ce656" office:value-type="string" calcext:value-type="string">
            <text:p>II.1. COSTOS DE PRODUCCIÒN</text:p>
          </table:table-cell>
          <table:table-cell table:style-name="ce732"/>
          <table:table-cell table:style-name="ce521" table:formula="of:=-[$'ESTADO GyP'.B10]" office:value-type="float" office:value="-45407.0823105033" calcext:value-type="float">
            <text:p><text:s/>(45,407.08)</text:p>
          </table:table-cell>
          <table:table-cell table:style-name="ce521" table:formula="of:=-[$'ESTADO GyP'.C10]" office:value-type="float" office:value="-116426.673626667" calcext:value-type="float">
            <text:p><text:s/>(116,426.67)</text:p>
          </table:table-cell>
          <table:table-cell table:style-name="ce521" table:formula="of:=-[$'ESTADO GyP'.D10]" office:value-type="float" office:value="-116426.673626667" calcext:value-type="float">
            <text:p><text:s/>(116,426.67)</text:p>
          </table:table-cell>
          <table:table-cell table:style-name="ce521" table:formula="of:=-[$'ESTADO GyP'.E10]" office:value-type="float" office:value="-116426.673626667" calcext:value-type="float">
            <text:p><text:s/>(116,426.67)</text:p>
          </table:table-cell>
          <table:table-cell table:style-name="ce521" table:formula="of:=-[$'ESTADO GyP'.F10]" office:value-type="float" office:value="-116426.673626667" calcext:value-type="float">
            <text:p><text:s/>(116,426.67)</text:p>
          </table:table-cell>
          <table:table-cell table:style-name="ce519"/>
          <table:table-cell table:number-columns-repeated="7"/>
          <table:table-cell table:style-name="ce519" table:number-columns-repeated="12"/>
          <table:table-cell table:number-columns-repeated="16357"/>
        </table:table-row>
        <table:table-row table:style-name="ro1">
          <table:table-cell table:style-name="ce656" office:value-type="string" calcext:value-type="string">
            <text:p>II.2. GASTOS DE OPERACIÒN</text:p>
          </table:table-cell>
          <table:table-cell table:style-name="ce732"/>
          <table:table-cell table:style-name="ce521" table:formula="of:=-[$'ESTADO GyP'.B12]" office:value-type="float" office:value="-4987" calcext:value-type="float">
            <text:p><text:s/>(4,987.00)</text:p>
          </table:table-cell>
          <table:table-cell table:style-name="ce521" table:formula="of:=-[$'ESTADO GyP'.C12]" office:value-type="float" office:value="-4987" calcext:value-type="float">
            <text:p><text:s/>(4,987.00)</text:p>
          </table:table-cell>
          <table:table-cell table:style-name="ce521" table:formula="of:=-[$'ESTADO GyP'.D12]" office:value-type="float" office:value="-4987" calcext:value-type="float">
            <text:p><text:s/>(4,987.00)</text:p>
          </table:table-cell>
          <table:table-cell table:style-name="ce521" table:formula="of:=-[$'ESTADO GyP'.E12]" office:value-type="float" office:value="-4987" calcext:value-type="float">
            <text:p><text:s/>(4,987.00)</text:p>
          </table:table-cell>
          <table:table-cell table:style-name="ce521" table:formula="of:=-[$'ESTADO GyP'.F12]" office:value-type="float" office:value="-4987" calcext:value-type="float">
            <text:p><text:s/>(4,987.00)</text:p>
          </table:table-cell>
          <table:table-cell table:style-name="ce519"/>
          <table:table-cell table:number-columns-repeated="7"/>
          <table:table-cell table:style-name="ce519" table:number-columns-repeated="12"/>
          <table:table-cell table:number-columns-repeated="16357"/>
        </table:table-row>
        <table:table-row table:style-name="ro1">
          <table:table-cell table:style-name="ce723" office:value-type="string" calcext:value-type="string">
            <text:p>II.3. IMPUESTO A LA RENTA</text:p>
          </table:table-cell>
          <table:table-cell table:style-name="ce733"/>
          <table:table-cell table:style-name="ce753" table:formula="of:=-[$'ESTADO GyP'.B17]" office:value-type="float" office:value="705.980139521147" calcext:value-type="float">
            <text:p><text:s/>705.98 </text:p>
          </table:table-cell>
          <table:table-cell table:style-name="ce753" table:formula="of:=-[$'ESTADO GyP'.C17]" office:value-type="float" office:value="-22581.2969899661" calcext:value-type="float">
            <text:p><text:s/>(22,581.30)</text:p>
          </table:table-cell>
          <table:table-cell table:style-name="ce753" table:formula="of:=-[$'ESTADO GyP'.D17]" office:value-type="float" office:value="-22581.2969899661" calcext:value-type="float">
            <text:p><text:s/>(22,581.30)</text:p>
          </table:table-cell>
          <table:table-cell table:style-name="ce753" table:formula="of:=-[$'ESTADO GyP'.E17]" office:value-type="float" office:value="-22581.2969899661" calcext:value-type="float">
            <text:p><text:s/>(22,581.30)</text:p>
          </table:table-cell>
          <table:table-cell table:style-name="ce753" table:formula="of:=-[$'ESTADO GyP'.F17]" office:value-type="float" office:value="-43406.3003797966" calcext:value-type="float">
            <text:p><text:s/>(43,406.30)</text:p>
          </table:table-cell>
          <table:table-cell table:style-name="ce519"/>
          <table:table-cell table:number-columns-repeated="7"/>
          <table:table-cell table:style-name="ce519" table:number-columns-repeated="12"/>
          <table:table-cell table:number-columns-repeated="16357"/>
        </table:table-row>
        <table:table-row table:style-name="ro1">
          <table:table-cell table:style-name="ce656" office:value-type="string" calcext:value-type="string">
            <text:p>II.4. INVERSION FIJA </text:p>
          </table:table-cell>
          <table:table-cell table:style-name="ce731" table:formula="of:=-SUM([.B18:.B22])" office:value-type="float" office:value="-140058.565385523" calcext:value-type="float">
            <text:p><text:s/>(140,058.57)</text:p>
          </table:table-cell>
          <table:table-cell table:style-name="ce521" table:number-columns-repeated="5"/>
          <table:table-cell table:style-name="ce519"/>
          <table:table-cell table:number-columns-repeated="7"/>
          <table:table-cell table:style-name="ce519" table:number-columns-repeated="12"/>
          <table:table-cell table:number-columns-repeated="16357"/>
        </table:table-row>
        <table:table-row table:style-name="ro1">
          <table:table-cell table:style-name="ce656" office:value-type="string" calcext:value-type="string">
            <text:p><text:s text:c="3"/>ACTIVO FIJO</text:p>
          </table:table-cell>
          <table:table-cell table:style-name="ce732" table:formula="of:=[$INVERSION.F7]" office:value-type="float" office:value="103076" calcext:value-type="float">
            <text:p><text:s/>103,076.00 </text:p>
          </table:table-cell>
          <table:table-cell table:style-name="ce521" table:number-columns-repeated="5"/>
          <table:table-cell table:style-name="ce519"/>
          <table:table-cell table:style-name="ce523"/>
          <table:table-cell table:style-name="ce767" office:value-type="string" calcext:value-type="string">
            <text:p>FLUJO DE CAJA</text:p>
          </table:table-cell>
          <table:table-cell table:style-name="ce522" table:number-columns-repeated="5"/>
          <table:table-cell table:style-name="ce519" table:number-columns-repeated="12"/>
          <table:table-cell table:number-columns-repeated="16357"/>
        </table:table-row>
        <table:table-row table:style-name="ro1">
          <table:table-cell table:style-name="ce656" office:value-type="string" calcext:value-type="string">
            <text:p><text:s text:c="3"/>ACTIVO INTANGIBLE</text:p>
          </table:table-cell>
          <table:table-cell table:style-name="ce732" table:formula="of:=[$INVERSION.F12]" office:value-type="float" office:value="18250" calcext:value-type="float">
            <text:p><text:s/>18,250.00 </text:p>
          </table:table-cell>
          <table:table-cell table:style-name="ce521" table:number-columns-repeated="5"/>
          <table:table-cell table:style-name="ce519"/>
          <table:table-cell table:style-name="ce770" office:value-type="string" calcext:value-type="string">
            <text:p>CONCEPTO</text:p>
          </table:table-cell>
          <table:table-cell table:style-name="ce772" office:value-type="float" office:value="0" calcext:value-type="float">
            <text:p>0</text:p>
          </table:table-cell>
          <table:table-cell table:style-name="ce776" office:value-type="float" office:value="1" calcext:value-type="float">
            <text:p><text:s/>1 </text:p>
          </table:table-cell>
          <table:table-cell table:style-name="ce776" office:value-type="float" office:value="2" calcext:value-type="float">
            <text:p><text:s/>2 </text:p>
          </table:table-cell>
          <table:table-cell table:style-name="ce776" office:value-type="float" office:value="3" calcext:value-type="float">
            <text:p><text:s/>3 </text:p>
          </table:table-cell>
          <table:table-cell table:style-name="ce776" office:value-type="float" office:value="4" calcext:value-type="float">
            <text:p><text:s/>4 </text:p>
          </table:table-cell>
          <table:table-cell table:style-name="ce776" office:value-type="float" office:value="5" calcext:value-type="float">
            <text:p><text:s/>5 </text:p>
          </table:table-cell>
          <table:table-cell table:style-name="ce519" table:number-columns-repeated="12"/>
          <table:table-cell table:number-columns-repeated="16357"/>
        </table:table-row>
        <table:table-row table:style-name="ro1">
          <table:table-cell table:style-name="ce656" office:value-type="string" calcext:value-type="string">
            <text:p><text:s text:c="3"/>CAPITAL DE TRABAJO</text:p>
          </table:table-cell>
          <table:table-cell table:style-name="ce732" table:formula="of:=[$INVERSION.F13]" office:value-type="float" office:value="4173.44538552312" calcext:value-type="float">
            <text:p><text:s/>4,173.45 </text:p>
          </table:table-cell>
          <table:table-cell table:style-name="ce521" table:formula="of:=-[$'CAP TRABAJ'.C46]" office:value-type="float" office:value="-817.086613949785" calcext:value-type="float">
            <text:p><text:s/>(817.09)</text:p>
          </table:table-cell>
          <table:table-cell table:style-name="ce521" table:formula="of:=-[$'CAP TRABAJ'.D46]" office:value-type="float" office:value="-980.503936739741" calcext:value-type="float">
            <text:p><text:s/>(980.50)</text:p>
          </table:table-cell>
          <table:table-cell table:style-name="ce521" table:formula="of:=-[$'CAP TRABAJ'.E46]" office:value-type="float" office:value="-1176.60472408769" calcext:value-type="float">
            <text:p><text:s/>(1,176.60)</text:p>
          </table:table-cell>
          <table:table-cell table:style-name="ce521" table:formula="of:=-[$'CAP TRABAJ'.F46]" office:value-type="float" office:value="-1411.92566890523" calcext:value-type="float">
            <text:p><text:s/>(1,411.93)</text:p>
          </table:table-cell>
          <table:table-cell table:style-name="ce521" table:formula="of:=-[$'CAP TRABAJ'.G46]" office:value-type="float" office:value="-1694.31080268627" calcext:value-type="float">
            <text:p><text:s/>(1,694.31)</text:p>
          </table:table-cell>
          <table:table-cell table:style-name="ce519"/>
          <table:table-cell table:style-name="ce726" office:value-type="string" calcext:value-type="string">
            <text:p>NOPAT</text:p>
          </table:table-cell>
          <table:table-cell table:style-name="ce519"/>
          <table:table-cell table:style-name="ce522" table:formula="of:=[.K11]" office:value-type="float" office:value="-1647.28699221601" calcext:value-type="float">
            <text:p><text:s/>(1,647.29)</text:p>
          </table:table-cell>
          <table:table-cell table:style-name="ce522" table:formula="of:=[.L11]" office:value-type="float" office:value="52689.6929765876" calcext:value-type="float">
            <text:p><text:s/>52,689.69 </text:p>
          </table:table-cell>
          <table:table-cell table:style-name="ce522" table:formula="of:=[.M11]" office:value-type="float" office:value="52689.6929765876" calcext:value-type="float">
            <text:p><text:s/>52,689.69 </text:p>
          </table:table-cell>
          <table:table-cell table:style-name="ce522" table:formula="of:=[.N11]" office:value-type="float" office:value="52689.6929765876" calcext:value-type="float">
            <text:p><text:s/>52,689.69 </text:p>
          </table:table-cell>
          <table:table-cell table:style-name="ce522" table:formula="of:=[.O11]" office:value-type="float" office:value="170698.04551896" calcext:value-type="float">
            <text:p><text:s/>170,698.05 </text:p>
          </table:table-cell>
          <table:table-cell table:style-name="ce519" table:number-columns-repeated="12"/>
          <table:table-cell table:number-columns-repeated="16357"/>
        </table:table-row>
        <table:table-row table:style-name="ro1">
          <table:table-cell table:style-name="ce395" office:value-type="string" calcext:value-type="string">
            <text:p><text:s text:c="3"/>GASTOS GENERALES</text:p>
          </table:table-cell>
          <table:table-cell table:style-name="ce734" table:formula="of:=[$INVERSION.F14]" office:value-type="float" office:value="9706.08" calcext:value-type="float">
            <text:p><text:s/>9,706.08 </text:p>
          </table:table-cell>
          <table:table-cell table:style-name="ce521" table:number-columns-repeated="5"/>
          <table:table-cell table:style-name="ce519"/>
          <table:table-cell table:style-name="ce726" office:value-type="string" calcext:value-type="string">
            <text:p>Depreciacion</text:p>
          </table:table-cell>
          <table:table-cell table:style-name="ce519"/>
          <table:table-cell table:style-name="ce522" table:formula="of:=[$'ESTADO GyP'.B15]" office:value-type="float" office:value="9301.86440677966" calcext:value-type="float">
            <text:p><text:s/>9,301.86 </text:p>
          </table:table-cell>
          <table:table-cell table:style-name="ce522" table:formula="of:=[$'ESTADO GyP'.C15]" office:value-type="float" office:value="9301.86440677966" calcext:value-type="float">
            <text:p><text:s/>9,301.86 </text:p>
          </table:table-cell>
          <table:table-cell table:style-name="ce522" table:formula="of:=[$'ESTADO GyP'.D15]" office:value-type="float" office:value="9301.86440677966" calcext:value-type="float">
            <text:p><text:s/>9,301.86 </text:p>
          </table:table-cell>
          <table:table-cell table:style-name="ce522" table:formula="of:=[$'ESTADO GyP'.E15]" office:value-type="float" office:value="9301.86440677966" calcext:value-type="float">
            <text:p><text:s/>9,301.86 </text:p>
          </table:table-cell>
          <table:table-cell table:style-name="ce522" table:formula="of:=[$'ESTADO GyP'.F15]" office:value-type="float" office:value="9301.86440677966" calcext:value-type="float">
            <text:p><text:s/>9,301.86 </text:p>
          </table:table-cell>
          <table:table-cell table:style-name="ce519" table:number-columns-repeated="12"/>
          <table:table-cell table:number-columns-repeated="16357"/>
        </table:table-row>
        <table:table-row table:style-name="ro1">
          <table:table-cell table:style-name="ce395" office:value-type="string" calcext:value-type="string">
            <text:p><text:s text:c="3"/>GASTOS DE SUPERVISION</text:p>
          </table:table-cell>
          <table:table-cell table:style-name="ce734" table:formula="of:=[$INVERSION.F15]" office:value-type="float" office:value="4853.04" calcext:value-type="float">
            <text:p><text:s/>4,853.04 </text:p>
          </table:table-cell>
          <table:table-cell table:style-name="ce521" table:number-columns-repeated="5"/>
          <table:table-cell table:style-name="ce519"/>
          <table:table-cell table:style-name="ce726" office:value-type="string" calcext:value-type="string">
            <text:p>Recupero de CT</text:p>
          </table:table-cell>
          <table:table-cell table:style-name="ce519"/>
          <table:table-cell table:style-name="ce522" table:number-columns-repeated="4"/>
          <table:table-cell table:style-name="ce522" table:formula="of:=[.J26]" office:value-type="float" office:value="4173.44538552312" calcext:value-type="float">
            <text:p><text:s/>4,173.45 </text:p>
          </table:table-cell>
          <table:table-cell table:style-name="ce519" table:number-columns-repeated="12"/>
          <table:table-cell table:number-columns-repeated="16357"/>
        </table:table-row>
        <table:table-row table:style-name="ro1">
          <table:table-cell table:style-name="ce724" office:value-type="string" calcext:value-type="string">
            <text:p>FLUJO DE CAJA ECONÒMICO</text:p>
          </table:table-cell>
          <table:table-cell table:style-name="ce735" table:formula="of:=[.B17]" office:value-type="float" office:value="-140058.565385523" calcext:value-type="float">
            <text:p><text:s/>(140,058.57)</text:p>
          </table:table-cell>
          <table:table-cell table:style-name="ce754" table:formula="of:=[.C9]+[.C13]" office:value-type="float" office:value="6837.49080061387" calcext:value-type="float">
            <text:p><text:s/>6,837.49 </text:p>
          </table:table-cell>
          <table:table-cell table:style-name="ce754" table:formula="of:=[.D9]+[.D13]" office:value-type="float" office:value="61011.0534466275" calcext:value-type="float">
            <text:p><text:s/>61,011.05 </text:p>
          </table:table-cell>
          <table:table-cell table:style-name="ce754" table:formula="of:=[.E9]+[.E13]" office:value-type="float" office:value="60814.9526592795" calcext:value-type="float">
            <text:p><text:s/>60,814.95 </text:p>
          </table:table-cell>
          <table:table-cell table:style-name="ce754" table:formula="of:=[.F9]+[.F13]" office:value-type="float" office:value="60579.631714462" calcext:value-type="float">
            <text:p><text:s/>60,579.63 </text:p>
          </table:table-cell>
          <table:table-cell table:style-name="ce754" table:formula="of:=[.G9]+[.G13]" office:value-type="float" office:value="188559.476254946" calcext:value-type="float">
            <text:p><text:s/>188,559.48 </text:p>
          </table:table-cell>
          <table:table-cell table:style-name="ce519"/>
          <table:table-cell table:style-name="ce727" office:value-type="string" calcext:value-type="string">
            <text:p>INVERSION</text:p>
          </table:table-cell>
          <table:table-cell table:style-name="ce773" table:formula="of:=-SUM([.J24:.J28])" office:value-type="float" office:value="-140058.565385523" calcext:value-type="float">
            <text:p><text:s/>(140,058.57)</text:p>
          </table:table-cell>
          <table:table-cell table:style-name="ce773" table:formula="of:=-SUM([.K24:.K28])" office:value-type="float" office:value="-817.086613949785" calcext:value-type="float">
            <text:p><text:s/>(817.09)</text:p>
          </table:table-cell>
          <table:table-cell table:style-name="ce773" table:formula="of:=-SUM([.L24:.L28])" office:value-type="float" office:value="-980.503936739741" calcext:value-type="float">
            <text:p><text:s/>(980.50)</text:p>
          </table:table-cell>
          <table:table-cell table:style-name="ce773" table:formula="of:=-SUM([.M24:.M28])" office:value-type="float" office:value="-1176.60472408769" calcext:value-type="float">
            <text:p><text:s/>(1,176.60)</text:p>
          </table:table-cell>
          <table:table-cell table:style-name="ce773" table:formula="of:=-SUM([.N24:.N28])" office:value-type="float" office:value="-1411.92566890523" calcext:value-type="float">
            <text:p><text:s/>(1,411.93)</text:p>
          </table:table-cell>
          <table:table-cell table:style-name="ce773" table:formula="of:=-SUM([.O24:.O28])" office:value-type="float" office:value="-1694.31080268627" calcext:value-type="float">
            <text:p><text:s/>(1,694.31)</text:p>
          </table:table-cell>
          <table:table-cell table:style-name="ce519" table:number-columns-repeated="12"/>
          <table:table-cell table:number-columns-repeated="16357"/>
        </table:table-row>
        <table:table-row table:style-name="ro1">
          <table:table-cell table:style-name="ce395" office:value-type="string" calcext:value-type="string">
            <text:p>PRESTAMO</text:p>
          </table:table-cell>
          <table:table-cell table:style-name="ce732" table:formula="of:=[$FINANCIAMIENT.B41]" office:value-type="float" office:value="5000" calcext:value-type="float">
            <text:p><text:s/>5,000.00 </text:p>
          </table:table-cell>
          <table:table-cell table:style-name="ce521" table:number-columns-repeated="5"/>
          <table:table-cell table:style-name="ce519"/>
          <table:table-cell table:style-name="ce726" office:value-type="string" calcext:value-type="string">
            <text:p>Activo Fijo</text:p>
          </table:table-cell>
          <table:table-cell table:style-name="ce672" table:formula="of:=[.B18]" office:value-type="float" office:value="103076" calcext:value-type="float">
            <text:p><text:s/>103,076.00 </text:p>
          </table:table-cell>
          <table:table-cell table:style-name="ce522" table:number-columns-repeated="5"/>
          <table:table-cell table:style-name="ce519" table:number-columns-repeated="12"/>
          <table:table-cell table:number-columns-repeated="16357"/>
        </table:table-row>
        <table:table-row table:style-name="ro1">
          <table:table-cell table:style-name="ce395" office:value-type="string" calcext:value-type="string">
            <text:p>SERVICIO DE DEUDA</text:p>
          </table:table-cell>
          <table:table-cell table:style-name="ce732"/>
          <table:table-cell table:style-name="ce521" table:formula="of:=-[$FINANCIAMIENT.B53]" office:value-type="float" office:value="-5388.86178313251" calcext:value-type="float">
            <text:p><text:s/>(5,388.86)</text:p>
          </table:table-cell>
          <table:table-cell table:style-name="ce521" table:formula="of:=-[$FINANCIAMIENT.C53]" office:value-type="float" office:value="0" calcext:value-type="float">
            <text:p><text:s/>- <text:s text:c="2"/></text:p>
          </table:table-cell>
          <table:table-cell table:style-name="ce521" table:formula="of:=-[$FINANCIAMIENT.D53]" office:value-type="float" office:value="0" calcext:value-type="float">
            <text:p><text:s/>- <text:s text:c="2"/></text:p>
          </table:table-cell>
          <table:table-cell table:style-name="ce521" table:number-columns-repeated="2"/>
          <table:table-cell table:style-name="ce519"/>
          <table:table-cell table:style-name="ce726" office:value-type="string" calcext:value-type="string">
            <text:p>Activo Intagible</text:p>
          </table:table-cell>
          <table:table-cell table:style-name="ce672" table:formula="of:=[.B19]" office:value-type="float" office:value="18250" calcext:value-type="float">
            <text:p><text:s/>18,250.00 </text:p>
          </table:table-cell>
          <table:table-cell table:style-name="ce522" table:number-columns-repeated="5"/>
          <table:table-cell table:style-name="ce519" table:number-columns-repeated="12"/>
          <table:table-cell table:number-columns-repeated="16357"/>
        </table:table-row>
        <table:table-row table:style-name="ro1">
          <table:table-cell table:style-name="ce395" office:value-type="string" calcext:value-type="string">
            <text:p>ESCUDO FISCAL</text:p>
          </table:table-cell>
          <table:table-cell table:style-name="ce732"/>
          <table:table-cell table:style-name="ce521" table:formula="of:=[$FINANCIAMIENT.B55]" office:value-type="float" office:value="116.658534939754" calcext:value-type="float">
            <text:p><text:s/>116.66 </text:p>
          </table:table-cell>
          <table:table-cell table:style-name="ce521" table:formula="of:=[$FINANCIAMIENT.C55]" office:value-type="float" office:value="0" calcext:value-type="float">
            <text:p><text:s/>- <text:s text:c="2"/></text:p>
          </table:table-cell>
          <table:table-cell table:style-name="ce521" table:formula="of:=[$FINANCIAMIENT.D55]" office:value-type="float" office:value="0" calcext:value-type="float">
            <text:p><text:s/>- <text:s text:c="2"/></text:p>
          </table:table-cell>
          <table:table-cell table:style-name="ce521" table:number-columns-repeated="2"/>
          <table:table-cell table:style-name="ce519"/>
          <table:table-cell table:style-name="ce726" office:value-type="string" calcext:value-type="string">
            <text:p>Capital de trabajo</text:p>
          </table:table-cell>
          <table:table-cell table:style-name="ce672" table:formula="of:=[.B20]" office:value-type="float" office:value="4173.44538552312" calcext:value-type="float">
            <text:p><text:s/>4,173.45 </text:p>
          </table:table-cell>
          <table:table-cell table:style-name="ce522" table:formula="of:=-[.C20]" office:value-type="float" office:value="817.086613949785" calcext:value-type="float">
            <text:p><text:s/>817.09 </text:p>
          </table:table-cell>
          <table:table-cell table:style-name="ce522" table:formula="of:=-[.D20]" office:value-type="float" office:value="980.503936739741" calcext:value-type="float">
            <text:p><text:s/>980.50 </text:p>
          </table:table-cell>
          <table:table-cell table:style-name="ce522" table:formula="of:=-[.E20]" office:value-type="float" office:value="1176.60472408769" calcext:value-type="float">
            <text:p><text:s/>1,176.60 </text:p>
          </table:table-cell>
          <table:table-cell table:style-name="ce522" table:formula="of:=-[.F20]" office:value-type="float" office:value="1411.92566890523" calcext:value-type="float">
            <text:p><text:s/>1,411.93 </text:p>
          </table:table-cell>
          <table:table-cell table:style-name="ce522" table:formula="of:=-[.G20]" office:value-type="float" office:value="1694.31080268627" calcext:value-type="float">
            <text:p><text:s/>1,694.31 </text:p>
          </table:table-cell>
          <table:table-cell table:style-name="ce519" table:number-columns-repeated="12"/>
          <table:table-cell table:number-columns-repeated="16357"/>
        </table:table-row>
        <table:table-row table:style-name="ro1">
          <table:table-cell table:style-name="ce724" office:value-type="string" calcext:value-type="string">
            <text:p>FLUJO DE CAJA FINANCIERO</text:p>
          </table:table-cell>
          <table:table-cell table:style-name="ce735" table:formula="of:=SUM([.B23:.B26])" office:value-type="float" office:value="-135058.565385523" calcext:value-type="float">
            <text:p><text:s/>(135,058.57)</text:p>
          </table:table-cell>
          <table:table-cell table:style-name="ce754" table:formula="of:=SUM([.C23:.C26])" office:value-type="float" office:value="1565.28755242112" calcext:value-type="float">
            <text:p><text:s/>1,565.29 </text:p>
          </table:table-cell>
          <table:table-cell table:style-name="ce754" table:formula="of:=SUM([.D23:.D26])" office:value-type="float" office:value="61011.0534466275" calcext:value-type="float">
            <text:p><text:s/>61,011.05 </text:p>
          </table:table-cell>
          <table:table-cell table:style-name="ce754" table:formula="of:=SUM([.E23:.E26])" office:value-type="float" office:value="60814.9526592795" calcext:value-type="float">
            <text:p><text:s/>60,814.95 </text:p>
          </table:table-cell>
          <table:table-cell table:style-name="ce754" table:formula="of:=SUM([.F23:.F26])" office:value-type="float" office:value="60579.631714462" calcext:value-type="float">
            <text:p><text:s/>60,579.63 </text:p>
          </table:table-cell>
          <table:table-cell table:style-name="ce754" table:formula="of:=SUM([.G23:.G26])" office:value-type="float" office:value="188559.476254946" calcext:value-type="float">
            <text:p><text:s/>188,559.48 </text:p>
          </table:table-cell>
          <table:table-cell table:style-name="ce519"/>
          <table:table-cell table:style-name="ce726" office:value-type="string" calcext:value-type="string">
            <text:p>Gastos Generales</text:p>
          </table:table-cell>
          <table:table-cell table:style-name="ce672" table:formula="of:=[.B21]" office:value-type="float" office:value="9706.08" calcext:value-type="float">
            <text:p><text:s/>9,706.08 </text:p>
          </table:table-cell>
          <table:table-cell table:style-name="ce522" table:number-columns-repeated="5"/>
          <table:table-cell table:style-name="ce519" table:number-columns-repeated="12"/>
          <table:table-cell table:number-columns-repeated="16357"/>
        </table:table-row>
        <table:table-row table:style-name="ro1">
          <table:table-cell table:style-name="ce509" office:value-type="string" calcext:value-type="string">
            <text:p>FUENTE: ELABORACION PROPIA</text:p>
          </table:table-cell>
          <table:table-cell table:style-name="ce736"/>
          <table:table-cell table:style-name="ce755" table:number-columns-repeated="5"/>
          <table:table-cell table:style-name="ce519"/>
          <table:table-cell table:style-name="ce726" office:value-type="string" calcext:value-type="string">
            <text:p>Gastos de Supervision</text:p>
          </table:table-cell>
          <table:table-cell table:style-name="ce672" table:formula="of:=[.B22]" office:value-type="float" office:value="4853.04" calcext:value-type="float">
            <text:p><text:s/>4,853.04 </text:p>
          </table:table-cell>
          <table:table-cell table:style-name="ce522" table:number-columns-repeated="5"/>
          <table:table-cell table:style-name="ce519" table:number-columns-repeated="12"/>
          <table:table-cell table:number-columns-repeated="16357"/>
        </table:table-row>
        <table:table-row table:style-name="ro1">
          <table:table-cell table:number-columns-repeated="7"/>
          <table:table-cell table:style-name="ce519"/>
          <table:table-cell table:style-name="ce770" office:value-type="string" calcext:value-type="string">
            <text:p>FLUJO DE CAJA LIBRE (FCL)</text:p>
          </table:table-cell>
          <table:table-cell table:style-name="ce774" table:formula="of:=[.J23]" office:value-type="float" office:value="-140058.565385523" calcext:value-type="float">
            <text:p><text:s/>(140,058.57)</text:p>
          </table:table-cell>
          <table:table-cell table:style-name="ce777" table:formula="of:=SUM([.K20:.K23])" office:value-type="float" office:value="6837.49080061387" calcext:value-type="float">
            <text:p><text:s/>6,837.49 </text:p>
          </table:table-cell>
          <table:table-cell table:style-name="ce777" table:formula="of:=SUM([.L20:.L23])" office:value-type="float" office:value="61011.0534466275" calcext:value-type="float">
            <text:p><text:s/>61,011.05 </text:p>
          </table:table-cell>
          <table:table-cell table:style-name="ce777" table:formula="of:=SUM([.M20:.M23])" office:value-type="float" office:value="60814.9526592796" calcext:value-type="float">
            <text:p><text:s/>60,814.95 </text:p>
          </table:table-cell>
          <table:table-cell table:style-name="ce777" table:formula="of:=SUM([.N20:.N23])" office:value-type="float" office:value="60579.631714462" calcext:value-type="float">
            <text:p><text:s/>60,579.63 </text:p>
          </table:table-cell>
          <table:table-cell table:style-name="ce777" table:formula="of:=SUM([.O20:.O23])" office:value-type="float" office:value="182479.044508577" calcext:value-type="float">
            <text:p><text:s/>182,479.04 </text:p>
          </table:table-cell>
          <table:table-cell table:style-name="ce519" table:number-columns-repeated="12"/>
          <table:table-cell table:number-columns-repeated="16357"/>
        </table:table-row>
        <table:table-row table:style-name="ro1">
          <table:table-cell table:style-name="ce523"/>
          <table:table-cell table:style-name="ce737"/>
          <table:table-cell table:style-name="ce756" table:number-columns-repeated="5"/>
          <table:table-cell table:style-name="ce523"/>
          <table:table-cell table:style-name="ce726" office:value-type="string" calcext:value-type="string">
            <text:p>Prestamo</text:p>
          </table:table-cell>
          <table:table-cell table:style-name="ce522" table:formula="of:=[$FINANCIAMIENT.B41]" office:value-type="float" office:value="5000" calcext:value-type="float">
            <text:p><text:s/>5,000.00 </text:p>
          </table:table-cell>
          <table:table-cell table:style-name="ce522" table:number-columns-repeated="5"/>
          <table:table-cell table:style-name="ce519" table:number-columns-repeated="12"/>
          <table:table-cell table:number-columns-repeated="16357"/>
        </table:table-row>
        <table:table-row table:style-name="ro1">
          <table:table-cell table:style-name="ce395" office:value-type="string" calcext:value-type="string">
            <text:p>COK</text:p>
          </table:table-cell>
          <table:table-cell table:style-name="ce738" office:value-type="percentage" office:value="0.2" calcext:value-type="percentage">
            <text:p>20 %</text:p>
          </table:table-cell>
          <table:table-cell table:style-name="ce522" table:number-columns-repeated="5"/>
          <table:table-cell table:style-name="ce523"/>
          <table:table-cell table:style-name="ce726" office:value-type="string" calcext:value-type="string">
            <text:p>Servicio a la deuda</text:p>
          </table:table-cell>
          <table:table-cell table:style-name="ce522"/>
          <table:table-cell table:style-name="ce522" table:formula="of:=-[$FINANCIAMIENT.B53]" office:value-type="float" office:value="-5388.86178313251" calcext:value-type="float">
            <text:p><text:s/>(5,388.86)</text:p>
          </table:table-cell>
          <table:table-cell table:style-name="ce522" table:formula="of:=-[$FINANCIAMIENT.C53]" office:value-type="float" office:value="0" calcext:value-type="float">
            <text:p><text:s/>- <text:s text:c="2"/></text:p>
          </table:table-cell>
          <table:table-cell table:style-name="ce522" table:formula="of:=-[$FINANCIAMIENT.D53]" office:value-type="float" office:value="0" calcext:value-type="float">
            <text:p><text:s/>- <text:s text:c="2"/></text:p>
          </table:table-cell>
          <table:table-cell table:style-name="ce522" table:formula="of:=-[$FINANCIAMIENT.E105]" office:value-type="float" office:value="0" calcext:value-type="float">
            <text:p><text:s/>- <text:s text:c="2"/></text:p>
          </table:table-cell>
          <table:table-cell table:style-name="ce522" table:formula="of:=-[$FINANCIAMIENT.F105]" office:value-type="float" office:value="0" calcext:value-type="float">
            <text:p><text:s/>- <text:s text:c="2"/></text:p>
          </table:table-cell>
          <table:table-cell/>
          <table:table-cell table:style-name="ce519" table:number-columns-repeated="11"/>
          <table:table-cell table:number-columns-repeated="16357"/>
        </table:table-row>
        <table:table-row table:style-name="ro1">
          <table:table-cell table:style-name="ce656" office:value-type="string" calcext:value-type="string">
            <text:p>TASA DE DESCUENTO</text:p>
          </table:table-cell>
          <table:table-cell table:style-name="ce739" table:formula="of:=[$FINANCIAMIENT.B42]" office:value-type="percentage" office:value="0.15" calcext:value-type="percentage">
            <text:p>15 %</text:p>
          </table:table-cell>
          <table:table-cell table:style-name="ce523"/>
          <table:table-cell table:style-name="ce656" office:value-type="string" calcext:value-type="string">
            <text:p>WACC</text:p>
          </table:table-cell>
          <table:table-cell table:style-name="ce762" table:formula="of:=(([$FINANCIAMIENT.B35])/([$FINANCIAMIENT.B37])*[.B32]*(1-28%))+[$FINANCIAMIENT.B36]/[$FINANCIAMIENT.B37]*[$'FLUJO DE CAJA '.B31]" office:value-type="percentage" office:value="0.196715659633284" calcext:value-type="percentage">
            <text:p>19.67 %</text:p>
          </table:table-cell>
          <table:table-cell table:style-name="ce764"/>
          <table:table-cell table:style-name="ce523" table:number-columns-repeated="2"/>
          <table:table-cell table:style-name="ce523" office:value-type="string" calcext:value-type="string">
            <text:p>Escudo Fiscal Tributario</text:p>
          </table:table-cell>
          <table:table-cell table:style-name="ce522"/>
          <table:table-cell table:style-name="ce522" table:formula="of:=[$FINANCIAMIENT.B55]" office:value-type="float" office:value="116.658534939754" calcext:value-type="float">
            <text:p><text:s/>116.66 </text:p>
          </table:table-cell>
          <table:table-cell table:style-name="ce522" table:formula="of:=[$FINANCIAMIENT.C55]" office:value-type="float" office:value="0" calcext:value-type="float">
            <text:p><text:s/>- <text:s text:c="2"/></text:p>
          </table:table-cell>
          <table:table-cell table:style-name="ce522" table:formula="of:=[$FINANCIAMIENT.D55]" office:value-type="float" office:value="0" calcext:value-type="float">
            <text:p><text:s/>- <text:s text:c="2"/></text:p>
          </table:table-cell>
          <table:table-cell table:style-name="ce522" table:formula="of:=[$FINANCIAMIENT.E107]" office:value-type="float" office:value="0" calcext:value-type="float">
            <text:p><text:s/>- <text:s text:c="2"/></text:p>
          </table:table-cell>
          <table:table-cell table:style-name="ce522" table:formula="of:=[$FINANCIAMIENT.F107]" office:value-type="float" office:value="0" calcext:value-type="float">
            <text:p><text:s/>- <text:s text:c="2"/></text:p>
          </table:table-cell>
          <table:table-cell/>
          <table:table-cell table:style-name="ce519" table:number-columns-repeated="11"/>
          <table:table-cell table:number-columns-repeated="16357"/>
        </table:table-row>
        <table:table-row table:style-name="ro1">
          <table:table-cell table:style-name="ce523"/>
          <table:table-cell table:style-name="ce737"/>
          <table:table-cell table:style-name="ce523" table:number-columns-repeated="2"/>
          <table:table-cell/>
          <table:table-cell table:style-name="ce523" table:number-columns-repeated="3"/>
          <table:table-cell table:style-name="ce770" office:value-type="string" calcext:value-type="string">
            <text:p>FLUJO DE CAJA FINANCIERO</text:p>
          </table:table-cell>
          <table:table-cell table:style-name="ce774" table:formula="of:=SUM([.J29:.J32])" office:value-type="float" office:value="-135058.565385523" calcext:value-type="float">
            <text:p><text:s/>(135,058.57)</text:p>
          </table:table-cell>
          <table:table-cell table:style-name="ce774" table:formula="of:=SUM([.K29:.K32])" office:value-type="float" office:value="1565.28755242111" calcext:value-type="float">
            <text:p><text:s/>1,565.29 </text:p>
          </table:table-cell>
          <table:table-cell table:style-name="ce774" table:formula="of:=SUM([.L29:.L32])" office:value-type="float" office:value="61011.0534466275" calcext:value-type="float">
            <text:p><text:s/>61,011.05 </text:p>
          </table:table-cell>
          <table:table-cell table:style-name="ce774" table:formula="of:=SUM([.M29:.M32])" office:value-type="float" office:value="60814.9526592796" calcext:value-type="float">
            <text:p><text:s/>60,814.95 </text:p>
          </table:table-cell>
          <table:table-cell table:style-name="ce774" table:formula="of:=SUM([.N29:.N32])" office:value-type="float" office:value="60579.631714462" calcext:value-type="float">
            <text:p><text:s/>60,579.63 </text:p>
          </table:table-cell>
          <table:table-cell table:style-name="ce774" table:formula="of:=SUM([.O29:.O32])" office:value-type="float" office:value="182479.044508577" calcext:value-type="float">
            <text:p><text:s/>182,479.04 </text:p>
          </table:table-cell>
          <table:table-cell/>
          <table:table-cell table:style-name="ce519" table:number-columns-repeated="11"/>
          <table:table-cell table:number-columns-repeated="16357"/>
        </table:table-row>
        <table:table-row table:style-name="ro1">
          <table:table-cell table:style-name="ce656" office:value-type="string" calcext:value-type="string">
            <text:p>VANE</text:p>
          </table:table-cell>
          <table:table-cell table:style-name="ce740" table:formula="of:=NPV([.E32];[.C23:.G23])+[.B23]" office:value-type="float" office:value="50101.1915976451" calcext:value-type="float">
            <text:p>S/. 50,101.19</text:p>
          </table:table-cell>
          <table:table-cell table:style-name="ce757"/>
          <table:table-cell table:style-name="ce761" table:number-columns-repeated="2"/>
          <table:table-cell table:style-name="ce765"/>
          <table:table-cell table:style-name="ce764"/>
          <table:table-cell table:style-name="ce523"/>
          <table:table-cell table:number-columns-repeated="8"/>
          <table:table-cell table:style-name="ce519" table:number-columns-repeated="11"/>
          <table:table-cell table:number-columns-repeated="16357"/>
        </table:table-row>
        <table:table-row table:style-name="ro1">
          <table:table-cell table:style-name="ce656" office:value-type="string" calcext:value-type="string">
            <text:p>VANF</text:p>
          </table:table-cell>
          <table:table-cell table:style-name="ce740" table:formula="of:=+[.B27]+NPV([.B31];[.C27:.G27])" office:value-type="float" office:value="48801.0052348695" calcext:value-type="float">
            <text:p>S/. 48,801.01</text:p>
          </table:table-cell>
          <table:table-cell table:style-name="ce757"/>
          <table:table-cell table:style-name="ce523" table:number-columns-repeated="4"/>
          <table:table-cell table:style-name="ce523" office:value-type="float" office:value="4050.000002528" calcext:value-type="float">
            <text:p>4050.000002528</text:p>
          </table:table-cell>
          <table:table-cell office:value-type="float" office:value="4050" calcext:value-type="float">
            <text:p>4050</text:p>
          </table:table-cell>
          <table:table-cell table:number-columns-repeated="7"/>
          <table:table-cell table:style-name="ce519" table:number-columns-repeated="11"/>
          <table:table-cell table:number-columns-repeated="16357"/>
        </table:table-row>
        <table:table-row table:style-name="ro1">
          <table:table-cell table:style-name="ce656" office:value-type="string" calcext:value-type="string">
            <text:p>TIRE</text:p>
          </table:table-cell>
          <table:table-cell table:style-name="ce741" table:formula="of:=IRR([.B23:.G23])" office:value-type="percentage" office:value="0.302559974713169" calcext:value-type="percentage">
            <text:p>30.26 %</text:p>
          </table:table-cell>
          <table:table-cell table:style-name="ce523"/>
          <table:table-cell/>
          <table:table-cell table:style-name="ce763"/>
          <table:table-cell table:style-name="ce523" table:number-columns-repeated="2"/>
          <table:table-cell table:style-name="ce523" office:value-type="float" office:value="156465.140377955" calcext:value-type="float">
            <text:p>156465.140377955</text:p>
          </table:table-cell>
          <table:table-cell office:value-type="float" office:value="156465.14" calcext:value-type="float">
            <text:p>156465.14</text:p>
          </table:table-cell>
          <table:table-cell table:number-columns-repeated="7"/>
          <table:table-cell table:style-name="ce519" table:number-columns-repeated="11"/>
          <table:table-cell table:number-columns-repeated="16357"/>
        </table:table-row>
        <table:table-row table:style-name="ro1">
          <table:table-cell table:style-name="ce656" office:value-type="string" calcext:value-type="string">
            <text:p>TIRF</text:p>
          </table:table-cell>
          <table:table-cell table:style-name="ce741" table:formula="of:=IRR([.B27:.G27])" office:value-type="percentage" office:value="0.30509757586853" calcext:value-type="percentage">
            <text:p>30.51 %</text:p>
          </table:table-cell>
          <table:table-cell table:style-name="ce523"/>
          <table:table-cell/>
          <table:table-cell table:style-name="ce523" table:number-columns-repeated="3"/>
          <table:table-cell table:formula="of:=SUM([.H35:.H36])" office:value-type="float" office:value="160515.140380483" calcext:value-type="float">
            <text:p>160515.140380483</text:p>
          </table:table-cell>
          <table:table-cell table:formula="of:=SUM([.I35:.I36])" office:value-type="float" office:value="160515.14" calcext:value-type="float">
            <text:p>160515.14</text:p>
          </table:table-cell>
          <table:table-cell table:number-columns-repeated="7"/>
          <table:table-cell table:style-name="ce519" table:number-columns-repeated="11"/>
          <table:table-cell table:number-columns-repeated="16357"/>
        </table:table-row>
        <table:table-row table:style-name="ro1">
          <table:table-cell table:style-name="ce523"/>
          <table:table-cell table:style-name="ce742"/>
          <table:table-cell table:style-name="ce523" table:number-columns-repeated="6"/>
          <table:table-cell table:number-columns-repeated="8"/>
          <table:table-cell table:style-name="ce519" table:number-columns-repeated="11"/>
          <table:table-cell table:number-columns-repeated="16357"/>
        </table:table-row>
        <table:table-row table:style-name="ro1">
          <table:table-cell table:style-name="ce523"/>
          <table:table-cell table:style-name="ce743" office:value-type="string" calcext:value-type="string">
            <text:p>INDICADOR BENEFICIO/COSTO</text:p>
          </table:table-cell>
          <table:table-cell table:style-name="ce523" table:number-columns-repeated="5"/>
          <table:table-cell table:formula="of:=([.H35]/([.H37]*[.B32]))*(1-0.28)+([.H36]/[.H37])*[.B31]" office:value-type="float" office:value="0.316063817827206" calcext:value-type="float">
            <text:p>0.316063817827206</text:p>
          </table:table-cell>
          <table:table-cell table:formula="of:=([.I35]/[.I37])*[.B32]*(1-0.28)+([.I36]/[.I37])*[.B31]" office:value-type="float" office:value="0.197678723639403" calcext:value-type="float">
            <text:p>0.197678723639403</text:p>
          </table:table-cell>
          <table:table-cell table:number-columns-repeated="7"/>
          <table:table-cell table:style-name="ce519" table:number-columns-repeated="11"/>
          <table:table-cell table:number-columns-repeated="16357"/>
        </table:table-row>
        <table:table-row table:style-name="ro1">
          <table:table-cell table:style-name="ce722" office:value-type="string" calcext:value-type="string" table:number-columns-spanned="1" table:number-rows-spanned="2">
            <text:p>INDICE BENEFICIO/COSTO</text:p>
          </table:table-cell>
          <table:table-cell table:style-name="ce744" office:value-type="string" calcext:value-type="string" table:number-columns-spanned="6" table:number-rows-spanned="1">
            <text:p>AÑOS</text:p>
          </table:table-cell>
          <table:covered-table-cell table:number-columns-repeated="4" table:style-name="ce758"/>
          <table:covered-table-cell table:style-name="ce766"/>
          <table:table-cell table:style-name="ce523"/>
          <table:table-cell table:formula="of:=(([.I35])/([.I37])*[.B32]*(1-28%))+[.I36]/[.I37]*[.B31]" office:value-type="float" office:value="0.197678723639403" calcext:value-type="float">
            <text:p>0.197678723639403</text:p>
          </table:table-cell>
          <table:table-cell table:number-columns-repeated="7"/>
          <table:table-cell table:style-name="ce519" table:number-columns-repeated="11"/>
          <table:table-cell table:number-columns-repeated="16357"/>
        </table:table-row>
        <table:table-row table:style-name="ro1">
          <table:covered-table-cell table:style-name="ce725"/>
          <table:table-cell table:style-name="ce745" office:value-type="float" office:value="0" calcext:value-type="float">
            <text:p>0</text:p>
          </table:table-cell>
          <table:table-cell table:style-name="ce744" office:value-type="float" office:value="1" calcext:value-type="float">
            <text:p>1</text:p>
          </table:table-cell>
          <table:table-cell table:style-name="ce744" office:value-type="float" office:value="2" calcext:value-type="float">
            <text:p>2</text:p>
          </table:table-cell>
          <table:table-cell table:style-name="ce744" office:value-type="float" office:value="3" calcext:value-type="float">
            <text:p>3</text:p>
          </table:table-cell>
          <table:table-cell table:style-name="ce744" office:value-type="float" office:value="4" calcext:value-type="float">
            <text:p>4</text:p>
          </table:table-cell>
          <table:table-cell table:style-name="ce744" office:value-type="float" office:value="5" calcext:value-type="float">
            <text:p>5</text:p>
          </table:table-cell>
          <table:table-cell table:style-name="ce523"/>
          <table:table-cell table:number-columns-repeated="8"/>
          <table:table-cell table:style-name="ce519" table:number-columns-repeated="11"/>
          <table:table-cell table:number-columns-repeated="16357"/>
        </table:table-row>
        <table:table-row table:style-name="ro1">
          <table:table-cell table:style-name="ce395" office:value-type="string" calcext:value-type="string">
            <text:p>BENEFICIOS</text:p>
          </table:table-cell>
          <table:table-cell table:style-name="ce746" table:formula="of:=[.B9]" office:value-type="float" office:value="0" calcext:value-type="float">
            <text:p>0</text:p>
          </table:table-cell>
          <table:table-cell table:style-name="ce521" table:formula="of:=[.C9]" office:value-type="float" office:value="57342.6795855458" calcext:value-type="float">
            <text:p><text:s/>57,342.68 </text:p>
          </table:table-cell>
          <table:table-cell table:style-name="ce521" table:formula="of:=[.D9]" office:value-type="float" office:value="205986.528" calcext:value-type="float">
            <text:p><text:s/>205,986.53 </text:p>
          </table:table-cell>
          <table:table-cell table:style-name="ce521" table:formula="of:=[.E9]" office:value-type="float" office:value="205986.528" calcext:value-type="float">
            <text:p><text:s/>205,986.53 </text:p>
          </table:table-cell>
          <table:table-cell table:style-name="ce521" table:formula="of:=[.F9]" office:value-type="float" office:value="205986.528" calcext:value-type="float">
            <text:p><text:s/>205,986.53 </text:p>
          </table:table-cell>
          <table:table-cell table:style-name="ce521" table:formula="of:=[.G9]" office:value-type="float" office:value="355073.761064095" calcext:value-type="float">
            <text:p><text:s/>355,073.76 </text:p>
          </table:table-cell>
          <table:table-cell table:style-name="ce519"/>
          <table:table-cell table:number-columns-repeated="8"/>
          <table:table-cell table:style-name="ce519" table:number-columns-repeated="11"/>
          <table:table-cell table:number-columns-repeated="16357"/>
        </table:table-row>
        <table:table-row table:style-name="ro1">
          <table:table-cell table:style-name="ce656" office:value-type="string" calcext:value-type="string">
            <text:p>COSTOS</text:p>
          </table:table-cell>
          <table:table-cell table:style-name="ce732" table:formula="of:=[.B17]" office:value-type="float" office:value="-140058.565385523" calcext:value-type="float">
            <text:p><text:s/>(140,058.57)</text:p>
          </table:table-cell>
          <table:table-cell table:style-name="ce521" table:formula="of:=[.C13]" office:value-type="float" office:value="-50505.1887849319" calcext:value-type="float">
            <text:p><text:s/>(50,505.19)</text:p>
          </table:table-cell>
          <table:table-cell table:style-name="ce521" table:formula="of:=[.D13]" office:value-type="float" office:value="-144975.474553373" calcext:value-type="float">
            <text:p><text:s/>(144,975.47)</text:p>
          </table:table-cell>
          <table:table-cell table:style-name="ce521" table:formula="of:=[.E13]" office:value-type="float" office:value="-145171.57534072" calcext:value-type="float">
            <text:p><text:s/>(145,171.58)</text:p>
          </table:table-cell>
          <table:table-cell table:style-name="ce521" table:formula="of:=[.F13]" office:value-type="float" office:value="-145406.896285538" calcext:value-type="float">
            <text:p><text:s/>(145,406.90)</text:p>
          </table:table-cell>
          <table:table-cell table:style-name="ce521" table:formula="of:=[.G13]" office:value-type="float" office:value="-166514.28480915" calcext:value-type="float">
            <text:p><text:s/>(166,514.28)</text:p>
          </table:table-cell>
          <table:table-cell table:style-name="ce519"/>
          <table:table-cell table:number-columns-repeated="8"/>
          <table:table-cell table:style-name="ce519" table:number-columns-repeated="11"/>
          <table:table-cell table:number-columns-repeated="16357"/>
        </table:table-row>
        <table:table-row table:style-name="ro1">
          <table:table-cell table:style-name="ce395" office:value-type="string" calcext:value-type="string">
            <text:p>FACTOR DE ACTUALIZACION</text:p>
          </table:table-cell>
          <table:table-cell table:style-name="ce747" table:formula="of:=1/(1+[.$B$32])^[.B41]" office:value-type="float" office:value="1" calcext:value-type="float">
            <text:p>1.0000000</text:p>
          </table:table-cell>
          <table:table-cell table:style-name="ce759" table:formula="of:=1/(1+[.$E$32])^[.C41]" office:value-type="float" office:value="0.835620384800877" calcext:value-type="float">
            <text:p><text:s/>0.835620 </text:p>
          </table:table-cell>
          <table:table-cell table:style-name="ce759" table:formula="of:=1/(1+[.$E$32])^[.D41]" office:value-type="float" office:value="0.698261427494766" calcext:value-type="float">
            <text:p><text:s/>0.698261 </text:p>
          </table:table-cell>
          <table:table-cell table:style-name="ce759" table:formula="of:=1/(1+[.$E$32])^[.E41]" office:value-type="float" office:value="0.583481482734786" calcext:value-type="float">
            <text:p><text:s/>0.583481 </text:p>
          </table:table-cell>
          <table:table-cell table:style-name="ce759" table:formula="of:=1/(1+[.$E$32])^[.F41]" office:value-type="float" office:value="0.487569021127028" calcext:value-type="float">
            <text:p><text:s/>0.487569 </text:p>
          </table:table-cell>
          <table:table-cell table:style-name="ce759" table:formula="of:=1/(1+[.$E$32])^[.G41]" office:value-type="float" office:value="0.407422613051154" calcext:value-type="float">
            <text:p><text:s/>0.407423 </text:p>
          </table:table-cell>
          <table:table-cell table:style-name="ce519"/>
          <table:table-cell table:number-columns-repeated="8"/>
          <table:table-cell table:style-name="ce519" table:number-columns-repeated="11"/>
          <table:table-cell table:number-columns-repeated="16357"/>
        </table:table-row>
        <table:table-row table:style-name="ro1">
          <table:table-cell table:style-name="ce395" office:value-type="string" calcext:value-type="string">
            <text:p>BENEFICIOS ACTUALIZADOS</text:p>
          </table:table-cell>
          <table:table-cell table:style-name="ce746" table:formula="of:=[.B42]*[.B44]" office:value-type="float" office:value="0" calcext:value-type="float">
            <text:p>0</text:p>
          </table:table-cell>
          <table:table-cell table:style-name="ce521" table:formula="of:=[.C42]*[.C44]" office:value-type="float" office:value="47916.7119807872" calcext:value-type="float">
            <text:p><text:s/>47,916.71 </text:p>
          </table:table-cell>
          <table:table-cell table:style-name="ce521" table:formula="of:=[.D42]*[.D44]" office:value-type="float" office:value="143832.447085971" calcext:value-type="float">
            <text:p><text:s/>143,832.45 </text:p>
          </table:table-cell>
          <table:table-cell table:style-name="ce521" table:formula="of:=[.E42]*[.E44]" office:value-type="float" office:value="120189.32478083" calcext:value-type="float">
            <text:p><text:s/>120,189.32 </text:p>
          </table:table-cell>
          <table:table-cell table:style-name="ce521" table:formula="of:=[.F42]*[.F44]" office:value-type="float" office:value="100432.649822315" calcext:value-type="float">
            <text:p><text:s/>100,432.65 </text:p>
          </table:table-cell>
          <table:table-cell table:style-name="ce521" table:formula="of:=[.G42]*[.G44]" office:value-type="float" office:value="144665.079558635" calcext:value-type="float">
            <text:p><text:s/>144,665.08 </text:p>
          </table:table-cell>
          <table:table-cell table:style-name="ce519"/>
          <table:table-cell table:number-columns-repeated="8"/>
          <table:table-cell table:style-name="ce519" table:number-columns-repeated="11"/>
          <table:table-cell table:number-columns-repeated="16357"/>
        </table:table-row>
        <table:table-row table:style-name="ro1">
          <table:table-cell table:style-name="ce395" office:value-type="string" calcext:value-type="string">
            <text:p>COSTOS ACTUALIZADOS</text:p>
          </table:table-cell>
          <table:table-cell table:style-name="ce746" table:formula="of:=[.B43]*[.B44]" office:value-type="float" office:value="-140058.565385523" calcext:value-type="float">
            <text:p>-140059</text:p>
          </table:table-cell>
          <table:table-cell table:style-name="ce521" table:formula="of:=[.C43]*[.C44]" office:value-type="float" office:value="-42203.1652869057" calcext:value-type="float">
            <text:p><text:s/>(42,203.17)</text:p>
          </table:table-cell>
          <table:table-cell table:style-name="ce521" table:formula="of:=[.D43]*[.D44]" office:value-type="float" office:value="-101230.781813369" calcext:value-type="float">
            <text:p><text:s/>(101,230.78)</text:p>
          </table:table-cell>
          <table:table-cell table:style-name="ce521" table:formula="of:=[.E43]*[.E44]" office:value-type="float" office:value="-84704.9260307482" calcext:value-type="float">
            <text:p><text:s/>(84,704.93)</text:p>
          </table:table-cell>
          <table:table-cell table:style-name="ce521" table:formula="of:=[.F43]*[.F44]" office:value-type="float" office:value="-70895.898087059" calcext:value-type="float">
            <text:p><text:s/>(70,895.90)</text:p>
          </table:table-cell>
          <table:table-cell table:style-name="ce521" table:formula="of:=[.G43]*[.G44]" office:value-type="float" office:value="-67841.6850272878" calcext:value-type="float">
            <text:p><text:s/>(67,841.69)</text:p>
          </table:table-cell>
          <table:table-cell table:style-name="ce519"/>
          <table:table-cell table:number-columns-repeated="8"/>
          <table:table-cell table:style-name="ce519" table:number-columns-repeated="11"/>
          <table:table-cell table:number-columns-repeated="16357"/>
        </table:table-row>
        <table:table-row table:style-name="ro1">
          <table:table-cell table:style-name="ce395" office:value-type="string" calcext:value-type="string">
            <text:p>FLUJO ECONOMICO ACTUALIZADO</text:p>
          </table:table-cell>
          <table:table-cell table:style-name="ce732" table:formula="of:=[.B45]+[.B46]" office:value-type="float" office:value="-140058.565385523" calcext:value-type="float">
            <text:p><text:s/>(140,058.57)</text:p>
          </table:table-cell>
          <table:table-cell table:style-name="ce521" table:formula="of:=[.C45]+[.C46]" office:value-type="float" office:value="5713.54669388142" calcext:value-type="float">
            <text:p><text:s/>5,713.55 </text:p>
          </table:table-cell>
          <table:table-cell table:style-name="ce521" table:formula="of:=[.D45]+[.D46]" office:value-type="float" office:value="42601.6652726015" calcext:value-type="float">
            <text:p><text:s/>42,601.67 </text:p>
          </table:table-cell>
          <table:table-cell table:style-name="ce521" table:formula="of:=[.E45]+[.E46]" office:value-type="float" office:value="35484.3987500822" calcext:value-type="float">
            <text:p><text:s/>35,484.40 </text:p>
          </table:table-cell>
          <table:table-cell table:style-name="ce521" table:formula="of:=[.F45]+[.F46]" office:value-type="float" office:value="29536.7517352561" calcext:value-type="float">
            <text:p><text:s/>29,536.75 </text:p>
          </table:table-cell>
          <table:table-cell table:style-name="ce521" table:formula="of:=[.G45]+[.G46]" office:value-type="float" office:value="76823.394531347" calcext:value-type="float">
            <text:p><text:s/>76,823.39 </text:p>
          </table:table-cell>
          <table:table-cell table:style-name="ce519"/>
          <table:table-cell table:number-columns-repeated="8"/>
          <table:table-cell table:style-name="ce519" table:number-columns-repeated="11"/>
          <table:table-cell table:number-columns-repeated="16357"/>
        </table:table-row>
        <table:table-row table:style-name="ro1" table:visibility="collapse">
          <table:table-cell table:style-name="ce523"/>
          <table:table-cell table:style-name="ce748"/>
          <table:table-cell table:style-name="ce760" table:number-columns-repeated="5"/>
          <table:table-cell table:style-name="ce519" table:number-columns-repeated="20"/>
          <table:table-cell table:number-columns-repeated="16357"/>
        </table:table-row>
        <table:table-row table:style-name="ro1">
          <table:table-cell table:style-name="ce645" office:value-type="string" calcext:value-type="string">
            <text:p>INDICADOR BENEFICIO/COSTO</text:p>
          </table:table-cell>
          <table:table-cell table:style-name="ce749" table:formula="of:=SUM([.B45:.G45])/-SUM([.B46:.G46])" office:value-type="float" office:value="1.09883158483796" calcext:value-type="float">
            <text:p>1.0988</text:p>
          </table:table-cell>
          <table:table-cell table:style-name="ce663" table:number-columns-repeated="5"/>
          <table:table-cell table:number-columns-repeated="3"/>
          <table:table-cell table:style-name="ce559"/>
          <table:table-cell table:number-columns-repeated="16373"/>
        </table:table-row>
        <table:table-row table:style-name="ro1">
          <table:table-cell table:style-name="ce392" office:value-type="string" calcext:value-type="string">
            <text:p>INDICE DE RENTABILIDAD</text:p>
          </table:table-cell>
          <table:table-cell table:style-name="ce750" table:formula="of:=SUM([.C47:.G47])/-[.B43]" office:value-type="float" office:value="1.35771601301025" calcext:value-type="float">
            <text:p>1.358</text:p>
          </table:table-cell>
          <table:table-cell table:style-name="ce663" table:number-columns-repeated="5"/>
          <table:table-cell table:number-columns-repeated="3"/>
          <table:table-cell table:style-name="ce559"/>
          <table:table-cell table:number-columns-repeated="16373"/>
        </table:table-row>
        <table:table-row table:style-name="ro1" table:number-rows-repeated="2">
          <table:table-cell table:style-name="ce364"/>
          <table:table-cell table:style-name="ce751"/>
          <table:table-cell table:style-name="ce663" table:number-columns-repeated="5"/>
          <table:table-cell table:number-columns-repeated="16377"/>
        </table:table-row>
        <table:table-row table:style-name="ro1">
          <table:table-cell table:style-name="ce523"/>
          <table:table-cell table:style-name="ce751"/>
          <table:table-cell table:style-name="ce663" table:number-columns-repeated="5"/>
          <table:table-cell table:number-columns-repeated="16377"/>
        </table:table-row>
        <table:table-row table:style-name="ro1">
          <table:table-cell table:style-name="ce726"/>
          <table:table-cell table:style-name="ce751"/>
          <table:table-cell table:style-name="ce663" table:number-columns-repeated="5"/>
          <table:table-cell table:number-columns-repeated="16377"/>
        </table:table-row>
        <table:table-row table:style-name="ro1">
          <table:table-cell table:style-name="ce523"/>
          <table:table-cell table:style-name="ce751"/>
          <table:table-cell table:style-name="ce663" table:number-columns-repeated="5"/>
          <table:table-cell table:number-columns-repeated="16377"/>
        </table:table-row>
        <table:table-row table:style-name="ro1">
          <table:table-cell table:style-name="ce726"/>
          <table:table-cell table:style-name="ce751"/>
          <table:table-cell table:style-name="ce663" table:number-columns-repeated="5"/>
          <table:table-cell table:number-columns-repeated="16377"/>
        </table:table-row>
        <table:table-row table:style-name="ro1">
          <table:table-cell table:style-name="ce726"/>
          <table:table-cell table:style-name="ce752"/>
          <table:table-cell table:style-name="ce663" table:number-columns-repeated="5"/>
          <table:table-cell table:number-columns-repeated="16377"/>
        </table:table-row>
        <table:table-row table:style-name="ro1">
          <table:table-cell table:style-name="ce523"/>
          <table:table-cell table:style-name="ce751"/>
          <table:table-cell table:style-name="ce663" table:number-columns-repeated="5"/>
          <table:table-cell table:number-columns-repeated="16377"/>
        </table:table-row>
        <table:table-row table:style-name="ro1">
          <table:table-cell table:style-name="ce727"/>
          <table:table-cell table:number-columns-repeated="16383"/>
        </table:table-row>
        <table:table-row table:style-name="ro1" table:number-rows-repeated="1048516">
          <table:table-cell table:number-columns-repeated="16384"/>
        </table:table-row>
        <table:table-row table:style-name="ro1">
          <table:table-cell table:number-columns-repeated="16384"/>
        </table:table-row>
        <table:named-expressions>
          <table:named-range table:name="_xlnm.Print_Area" table:base-cell-address="$POBLACION.$A$1" table:cell-range-address="$'FLUJO DE CAJA '.$A$6:.$G$51" table:range-usable-as="print-range"/>
        </table:named-expressions>
      </table:table>
      <table:table table:name="ANALISIS SESIB" table:style-name="ta21" table:print-ranges="'ANALISIS SESIB'.F1:'ANALISIS SESIB'.K22">
        <table:table-column table:style-name="co51" table:default-cell-style-name="ce158"/>
        <table:table-column table:style-name="co85" table:default-cell-style-name="ce158"/>
        <table:table-column table:style-name="co20" table:default-cell-style-name="ce158"/>
        <table:table-column table:style-name="co105" table:default-cell-style-name="ce158"/>
        <table:table-column table:style-name="co1" table:default-cell-style-name="ce158"/>
        <table:table-column table:style-name="co106" table:default-cell-style-name="ce158"/>
        <table:table-column table:style-name="co1" table:default-cell-style-name="ce158"/>
        <table:table-column table:style-name="co39" table:default-cell-style-name="ce158"/>
        <table:table-column table:style-name="co1" table:default-cell-style-name="ce158"/>
        <table:table-column table:style-name="co107" table:default-cell-style-name="ce158"/>
        <table:table-column table:style-name="co1" table:number-columns-repeated="3" table:default-cell-style-name="ce158"/>
        <table:table-column table:style-name="co102" table:default-cell-style-name="ce158"/>
        <table:table-column table:style-name="co37" table:default-cell-style-name="ce158"/>
        <table:table-column table:style-name="co21" table:default-cell-style-name="ce158"/>
        <table:table-column table:style-name="co1" table:default-cell-style-name="ce158"/>
        <table:table-column table:style-name="co108" table:default-cell-style-name="ce158"/>
        <table:table-column table:style-name="co95" table:default-cell-style-name="ce158"/>
        <table:table-column table:style-name="co60" table:default-cell-style-name="ce158"/>
        <table:table-column table:style-name="co9" table:number-columns-repeated="4" table:default-cell-style-name="ce158"/>
        <table:table-column table:style-name="co1" table:number-columns-repeated="2" table:default-cell-style-name="ce158"/>
        <table:table-column table:style-name="co108" table:default-cell-style-name="ce158"/>
        <table:table-column table:style-name="co109" table:default-cell-style-name="ce158"/>
        <table:table-column table:style-name="co1" table:default-cell-style-name="ce158"/>
        <table:table-column table:style-name="co9" table:number-columns-repeated="4" table:default-cell-style-name="ce158"/>
        <table:table-column table:style-name="co1" table:number-columns-repeated="2" table:default-cell-style-name="ce158"/>
        <table:table-column table:style-name="co108" table:default-cell-style-name="ce158"/>
        <table:table-column table:style-name="co95" table:default-cell-style-name="ce158"/>
        <table:table-column table:style-name="co60" table:default-cell-style-name="ce158"/>
        <table:table-column table:style-name="co9" table:number-columns-repeated="4" table:default-cell-style-name="ce158"/>
        <table:table-column table:style-name="co1" table:number-columns-repeated="2" table:default-cell-style-name="ce158"/>
        <table:table-column table:style-name="co108" table:default-cell-style-name="ce158"/>
        <table:table-column table:style-name="co95" table:default-cell-style-name="ce158"/>
        <table:table-column table:style-name="co60" table:default-cell-style-name="ce158"/>
        <table:table-column table:style-name="co9" table:number-columns-repeated="4" table:default-cell-style-name="ce158"/>
        <table:table-column table:style-name="co36" table:default-cell-style-name="ce158"/>
        <table:table-column table:style-name="co1" table:default-cell-style-name="ce158"/>
        <table:table-column table:style-name="co108" table:default-cell-style-name="ce158"/>
        <table:table-column table:style-name="co95" table:default-cell-style-name="ce158"/>
        <table:table-column table:style-name="co60" table:default-cell-style-name="ce158"/>
        <table:table-column table:style-name="co9" table:number-columns-repeated="4" table:default-cell-style-name="ce158"/>
        <table:table-column table:style-name="co36" table:default-cell-style-name="ce158"/>
        <table:table-column table:style-name="co1" table:default-cell-style-name="ce158"/>
        <table:table-column table:style-name="co108" table:default-cell-style-name="ce158"/>
        <table:table-column table:style-name="co95" table:default-cell-style-name="ce158"/>
        <table:table-column table:style-name="co60" table:default-cell-style-name="ce158"/>
        <table:table-column table:style-name="co9" table:number-columns-repeated="4" table:default-cell-style-name="ce158"/>
        <table:table-column table:style-name="co36" table:default-cell-style-name="ce158"/>
        <table:table-column table:style-name="co1" table:default-cell-style-name="ce158"/>
        <table:table-column table:style-name="co108" table:default-cell-style-name="ce158"/>
        <table:table-column table:style-name="co95" table:default-cell-style-name="ce158"/>
        <table:table-column table:style-name="co60" table:default-cell-style-name="ce158"/>
        <table:table-column table:style-name="co9" table:number-columns-repeated="4" table:default-cell-style-name="ce158"/>
        <table:table-column table:style-name="co36" table:default-cell-style-name="ce158"/>
        <table:table-column table:style-name="co1" table:number-columns-repeated="16305" table:default-cell-style-name="ce158"/>
        <table:table-row table:style-name="ro21">
          <table:table-cell table:style-name="ce778" office:value-type="string" calcext:value-type="string">
            <text:p>WACC</text:p>
          </table:table-cell>
          <table:table-cell table:style-name="ce787" table:formula="of:=[$'FLUJO DE CAJA '.E32]" office:value-type="percentage" office:value="0.196715659633284" calcext:value-type="percentage">
            <text:p>19.67 %</text:p>
          </table:table-cell>
          <table:table-cell table:number-columns-repeated="4"/>
          <table:table-cell table:style-name="ce778" office:value-type="string" calcext:value-type="string">
            <text:p>COK</text:p>
          </table:table-cell>
          <table:table-cell table:style-name="ce787" table:formula="of:=[$'FLUJO DE CAJA '.B31]" office:value-type="percentage" office:value="0.2" calcext:value-type="percentage">
            <text:p>20.00 %</text:p>
          </table:table-cell>
          <table:table-cell table:number-columns-repeated="9"/>
          <table:table-cell table:style-name="ce820" office:value-type="string" calcext:value-type="string" table:number-columns-spanned="7" table:number-rows-spanned="1">
            <text:p>FLUJO DE CAJA ECONÓMICO Y FINANCIERO</text:p>
          </table:table-cell>
          <table:covered-table-cell table:number-columns-repeated="6" table:style-name="ce824"/>
          <table:table-cell table:number-columns-repeated="2"/>
          <table:table-cell table:style-name="ce820" office:value-type="string" calcext:value-type="string" table:number-columns-spanned="7" table:number-rows-spanned="1">
            <text:p>FLUJO DE CAJA ECONÓMICO Y FINANCIERO</text:p>
          </table:table-cell>
          <table:covered-table-cell table:number-columns-repeated="6" table:style-name="ce824"/>
          <table:table-cell table:number-columns-repeated="2"/>
          <table:table-cell table:style-name="ce820" office:value-type="string" calcext:value-type="string" table:number-columns-spanned="7" table:number-rows-spanned="1">
            <text:p>FLUJO DE CAJA ECONÓMICO Y FINANCIERO</text:p>
          </table:table-cell>
          <table:covered-table-cell table:number-columns-repeated="6" table:style-name="ce824"/>
          <table:table-cell table:number-columns-repeated="2"/>
          <table:table-cell table:style-name="ce820" office:value-type="string" calcext:value-type="string" table:number-columns-spanned="7" table:number-rows-spanned="1">
            <text:p>FLUJO DE CAJA ECONÓMICO Y FINANCIERO</text:p>
          </table:table-cell>
          <table:covered-table-cell table:number-columns-repeated="6" table:style-name="ce824"/>
          <table:table-cell table:number-columns-repeated="2"/>
          <table:table-cell table:style-name="ce820" office:value-type="string" calcext:value-type="string" table:number-columns-spanned="7" table:number-rows-spanned="1">
            <text:p>FLUJO DE CAJA ECONÓMICO Y FINANCIERO</text:p>
          </table:table-cell>
          <table:covered-table-cell table:number-columns-repeated="6" table:style-name="ce824"/>
          <table:table-cell table:number-columns-repeated="2"/>
          <table:table-cell table:style-name="ce820" office:value-type="string" calcext:value-type="string" table:number-columns-spanned="7" table:number-rows-spanned="1">
            <text:p>FLUJO DE CAJA ECONÓMICO Y FINANCIERO</text:p>
          </table:table-cell>
          <table:covered-table-cell table:number-columns-repeated="6" table:style-name="ce824"/>
          <table:table-cell table:number-columns-repeated="2"/>
          <table:table-cell table:style-name="ce820" office:value-type="string" calcext:value-type="string" table:number-columns-spanned="7" table:number-rows-spanned="1">
            <text:p>FLUJO DE CAJA ECONÓMICO Y FINANCIERO</text:p>
          </table:table-cell>
          <table:covered-table-cell table:number-columns-repeated="6" table:style-name="ce824"/>
          <table:table-cell table:number-columns-repeated="16306"/>
        </table:table-row>
        <table:table-row table:style-name="ro21">
          <table:table-cell table:style-name="ce779" table:number-columns-spanned="4" table:number-rows-spanned="1"/>
          <table:covered-table-cell table:number-columns-repeated="3" table:style-name="ce788"/>
          <table:table-cell table:style-name="ce783" table:number-columns-repeated="2"/>
          <table:table-cell table:style-name="ce779" table:number-columns-spanned="4" table:number-rows-spanned="1"/>
          <table:covered-table-cell table:number-columns-repeated="3" table:style-name="ce788"/>
          <table:table-cell table:style-name="ce783" table:number-columns-repeated="2"/>
          <table:table-cell table:number-columns-repeated="5"/>
          <table:table-cell table:style-name="ce820" table:number-columns-spanned="2" table:number-rows-spanned="1"/>
          <table:covered-table-cell table:style-name="ce824"/>
          <table:table-cell table:style-name="ce831" office:value-type="string" calcext:value-type="string">
            <text:p>Producción</text:p>
          </table:table-cell>
          <table:table-cell table:style-name="ce834" table:formula="of:=+[.N3]" office:value-type="percentage" office:value="1" calcext:value-type="percentage">
            <text:p>100 %</text:p>
          </table:table-cell>
          <table:table-cell table:style-name="ce831" office:value-type="string" calcext:value-type="string">
            <text:p>Precio</text:p>
          </table:table-cell>
          <table:table-cell table:style-name="ce834" table:formula="of:=+[.O3]" office:value-type="percentage" office:value="1" calcext:value-type="percentage">
            <text:p>100 %</text:p>
          </table:table-cell>
          <table:table-cell table:number-columns-repeated="3"/>
          <table:table-cell table:style-name="ce820" table:number-columns-spanned="2" table:number-rows-spanned="1"/>
          <table:covered-table-cell table:style-name="ce824"/>
          <table:table-cell table:style-name="ce831" office:value-type="string" calcext:value-type="string">
            <text:p>Producción</text:p>
          </table:table-cell>
          <table:table-cell table:style-name="ce834" table:formula="of:=+[.N15]" office:value-type="percentage" office:value="0.95" calcext:value-type="percentage">
            <text:p>95 %</text:p>
          </table:table-cell>
          <table:table-cell table:style-name="ce831" office:value-type="string" calcext:value-type="string">
            <text:p>Precio</text:p>
          </table:table-cell>
          <table:table-cell table:style-name="ce834" table:formula="of:=+[.O15]" office:value-type="percentage" office:value="1" calcext:value-type="percentage">
            <text:p>100 %</text:p>
          </table:table-cell>
          <table:table-cell table:number-columns-repeated="3"/>
          <table:table-cell table:style-name="ce820" table:number-columns-spanned="2" table:number-rows-spanned="1"/>
          <table:covered-table-cell table:style-name="ce824"/>
          <table:table-cell table:style-name="ce831" office:value-type="string" calcext:value-type="string">
            <text:p>Producción</text:p>
          </table:table-cell>
          <table:table-cell table:style-name="ce834" table:formula="of:=+[.N26]" office:value-type="percentage" office:value="0.9" calcext:value-type="percentage">
            <text:p>90 %</text:p>
          </table:table-cell>
          <table:table-cell table:style-name="ce831" office:value-type="string" calcext:value-type="string">
            <text:p>Precio</text:p>
          </table:table-cell>
          <table:table-cell table:style-name="ce834" table:formula="of:=+[.O26]" office:value-type="percentage" office:value="1" calcext:value-type="percentage">
            <text:p>100 %</text:p>
          </table:table-cell>
          <table:table-cell table:number-columns-repeated="3"/>
          <table:table-cell table:style-name="ce820" table:number-columns-spanned="2" table:number-rows-spanned="1"/>
          <table:covered-table-cell table:style-name="ce824"/>
          <table:table-cell table:style-name="ce831" office:value-type="string" calcext:value-type="string">
            <text:p>Producción</text:p>
          </table:table-cell>
          <table:table-cell table:style-name="ce834" table:formula="of:=+[.N37]" office:value-type="percentage" office:value="0.85" calcext:value-type="percentage">
            <text:p>85 %</text:p>
          </table:table-cell>
          <table:table-cell table:style-name="ce831" office:value-type="string" calcext:value-type="string">
            <text:p>Precio</text:p>
          </table:table-cell>
          <table:table-cell table:style-name="ce834" table:formula="of:=+[.O37]" office:value-type="percentage" office:value="1" calcext:value-type="percentage">
            <text:p>100 %</text:p>
          </table:table-cell>
          <table:table-cell table:number-columns-repeated="3"/>
          <table:table-cell table:style-name="ce820" table:number-columns-spanned="2" table:number-rows-spanned="1"/>
          <table:covered-table-cell table:style-name="ce824"/>
          <table:table-cell table:style-name="ce831" office:value-type="string" calcext:value-type="string">
            <text:p>Producción</text:p>
          </table:table-cell>
          <table:table-cell table:style-name="ce834" table:formula="of:=+[.N48]" office:value-type="percentage" office:value="1" calcext:value-type="percentage">
            <text:p>100 %</text:p>
          </table:table-cell>
          <table:table-cell table:style-name="ce831" office:value-type="string" calcext:value-type="string">
            <text:p>Precio</text:p>
          </table:table-cell>
          <table:table-cell table:style-name="ce834" table:formula="of:=+[.O48]" office:value-type="percentage" office:value="0.97" calcext:value-type="percentage">
            <text:p>97 %</text:p>
          </table:table-cell>
          <table:table-cell table:number-columns-repeated="3"/>
          <table:table-cell table:style-name="ce820" table:number-columns-spanned="2" table:number-rows-spanned="1"/>
          <table:covered-table-cell table:style-name="ce824"/>
          <table:table-cell table:style-name="ce831" office:value-type="string" calcext:value-type="string">
            <text:p>Producción</text:p>
          </table:table-cell>
          <table:table-cell table:style-name="ce834" table:formula="of:=+[.N59]" office:value-type="percentage" office:value="1" calcext:value-type="percentage">
            <text:p>100 %</text:p>
          </table:table-cell>
          <table:table-cell table:style-name="ce831" office:value-type="string" calcext:value-type="string">
            <text:p>Precio</text:p>
          </table:table-cell>
          <table:table-cell table:style-name="ce834" table:formula="of:=+[.O59]" office:value-type="percentage" office:value="0.92" calcext:value-type="percentage">
            <text:p>92 %</text:p>
          </table:table-cell>
          <table:table-cell table:number-columns-repeated="3"/>
          <table:table-cell table:style-name="ce820" table:number-columns-spanned="2" table:number-rows-spanned="1"/>
          <table:covered-table-cell table:style-name="ce824"/>
          <table:table-cell table:style-name="ce831" office:value-type="string" calcext:value-type="string">
            <text:p>Producción</text:p>
          </table:table-cell>
          <table:table-cell table:style-name="ce834" table:formula="of:=+[.N70]" office:value-type="percentage" office:value="1" calcext:value-type="percentage">
            <text:p>100 %</text:p>
          </table:table-cell>
          <table:table-cell table:style-name="ce831" office:value-type="string" calcext:value-type="string">
            <text:p>Precio</text:p>
          </table:table-cell>
          <table:table-cell table:style-name="ce834" table:formula="of:=+[.O70]" office:value-type="percentage" office:value="0.84" calcext:value-type="percentage">
            <text:p>84 %</text:p>
          </table:table-cell>
          <table:table-cell table:number-columns-repeated="16307"/>
        </table:table-row>
        <table:table-row table:style-name="ro1">
          <table:table-cell table:style-name="ce780" office:value-type="string" calcext:value-type="string" table:number-columns-spanned="4" table:number-rows-spanned="1">
            <text:p>EVALUACION ECONOMICA</text:p>
          </table:table-cell>
          <table:covered-table-cell table:number-columns-repeated="3" table:style-name="ce780"/>
          <table:table-cell table:style-name="ce783" table:number-columns-repeated="2"/>
          <table:table-cell table:style-name="ce780" office:value-type="string" calcext:value-type="string" table:number-columns-spanned="4" table:number-rows-spanned="1">
            <text:p>EVALUACION FINANCIERA</text:p>
          </table:table-cell>
          <table:covered-table-cell table:number-columns-repeated="3" table:style-name="ce780"/>
          <table:table-cell table:style-name="ce783" table:number-columns-repeated="2"/>
          <table:table-cell/>
          <table:table-cell table:number-columns-repeated="2" table:style-name="ce817" office:value-type="percentage" office:value="1" calcext:value-type="percentage">
            <text:p>100 %</text:p>
          </table:table-cell>
          <table:table-cell table:number-columns-repeated="2"/>
          <table:table-cell table:style-name="ce388" office:value-type="string" calcext:value-type="string" table:number-columns-spanned="7" table:number-rows-spanned="1">
            <text:p>FLUJO DE CAJA ECONOMICO Y FINANCIERO</text:p>
          </table:table-cell>
          <table:covered-table-cell table:number-columns-repeated="6" table:style-name="ce388"/>
          <table:table-cell table:number-columns-repeated="2"/>
          <table:table-cell table:style-name="ce388" office:value-type="string" calcext:value-type="string" table:number-columns-spanned="7" table:number-rows-spanned="1">
            <text:p>FLUJO DE CAJA ECONOMICO Y FINANCIERO</text:p>
          </table:table-cell>
          <table:covered-table-cell table:number-columns-repeated="6" table:style-name="ce388"/>
          <table:table-cell table:number-columns-repeated="2"/>
          <table:table-cell table:style-name="ce388" office:value-type="string" calcext:value-type="string" table:number-columns-spanned="7" table:number-rows-spanned="1">
            <text:p>FLUJO DE CAJA ECONOMICO Y FINANCIERO</text:p>
          </table:table-cell>
          <table:covered-table-cell table:number-columns-repeated="6" table:style-name="ce388"/>
          <table:table-cell table:number-columns-repeated="2"/>
          <table:table-cell table:style-name="ce388" office:value-type="string" calcext:value-type="string" table:number-columns-spanned="7" table:number-rows-spanned="1">
            <text:p>FLUJO DE CAJA ECONOMICO Y FINANCIERO</text:p>
          </table:table-cell>
          <table:covered-table-cell table:number-columns-repeated="6" table:style-name="ce388"/>
          <table:table-cell table:number-columns-repeated="2"/>
          <table:table-cell table:style-name="ce388" office:value-type="string" calcext:value-type="string" table:number-columns-spanned="7" table:number-rows-spanned="1">
            <text:p>FLUJO DE CAJA ECONOMICO Y FINANCIERO</text:p>
          </table:table-cell>
          <table:covered-table-cell table:number-columns-repeated="6" table:style-name="ce388"/>
          <table:table-cell table:number-columns-repeated="2"/>
          <table:table-cell table:style-name="ce388" office:value-type="string" calcext:value-type="string" table:number-columns-spanned="7" table:number-rows-spanned="1">
            <text:p>FLUJO DE CAJA ECONOMICO Y FINANCIERO</text:p>
          </table:table-cell>
          <table:covered-table-cell table:number-columns-repeated="6" table:style-name="ce388"/>
          <table:table-cell table:number-columns-repeated="2"/>
          <table:table-cell table:style-name="ce388" office:value-type="string" calcext:value-type="string" table:number-columns-spanned="7" table:number-rows-spanned="1">
            <text:p>FLUJO DE CAJA ECONOMICO Y FINANCIERO</text:p>
          </table:table-cell>
          <table:covered-table-cell table:number-columns-repeated="6" table:style-name="ce388"/>
          <table:table-cell table:number-columns-repeated="16306"/>
        </table:table-row>
        <table:table-row table:style-name="ro2">
          <table:table-cell table:style-name="ce537" office:value-type="string" calcext:value-type="string">
            <text:p>AÑO</text:p>
          </table:table-cell>
          <table:table-cell table:style-name="ce537" office:value-type="string" calcext:value-type="string">
            <text:p>FCE</text:p>
          </table:table-cell>
          <table:table-cell table:style-name="ce537" office:value-type="string" calcext:value-type="string">
            <text:p>FA</text:p>
          </table:table-cell>
          <table:table-cell table:style-name="ce537" office:value-type="string" calcext:value-type="string">
            <text:p>VAN</text:p>
          </table:table-cell>
          <table:table-cell table:style-name="ce783" table:number-columns-repeated="2"/>
          <table:table-cell table:style-name="ce655" office:value-type="string" calcext:value-type="string">
            <text:p>AÑO</text:p>
          </table:table-cell>
          <table:table-cell table:style-name="ce655" office:value-type="string" calcext:value-type="string">
            <text:p>FCF</text:p>
          </table:table-cell>
          <table:table-cell table:style-name="ce655" office:value-type="string" calcext:value-type="string">
            <text:p>FAS</text:p>
          </table:table-cell>
          <table:table-cell table:style-name="ce655" office:value-type="string" calcext:value-type="string">
            <text:p>VANF</text:p>
          </table:table-cell>
          <table:table-cell table:style-name="ce783" table:number-columns-repeated="2"/>
          <table:table-cell table:style-name="ce227" office:value-type="string" calcext:value-type="string" table:number-columns-spanned="1" table:number-rows-spanned="2">
            <text:p>Años</text:p>
          </table:table-cell>
          <table:table-cell table:style-name="ce227" office:value-type="string" calcext:value-type="string" table:number-columns-spanned="1" table:number-rows-spanned="2">
            <text:p>Produccion (UND.)</text:p>
          </table:table-cell>
          <table:table-cell table:style-name="ce227" office:value-type="string" calcext:value-type="string" table:number-columns-spanned="1" table:number-rows-spanned="2">
            <text:p>Precio por Und (S/.)</text:p>
          </table:table-cell>
          <table:table-cell table:style-name="ce227" office:value-type="string" calcext:value-type="string" table:number-columns-spanned="1" table:number-rows-spanned="2">
            <text:p>Ventas proyectadas (S/.)</text:p>
          </table:table-cell>
          <table:table-cell/>
          <table:table-cell table:style-name="ce722" office:value-type="string" calcext:value-type="string">
            <text:p>CONCEPTO</text:p>
          </table:table-cell>
          <table:table-cell table:style-name="ce730" office:value-type="float" office:value="0" calcext:value-type="float">
            <text:p>0</text:p>
          </table:table-cell>
          <table:table-cell table:style-name="ce722" office:value-type="float" office:value="1" calcext:value-type="float">
            <text:p>1</text:p>
          </table:table-cell>
          <table:table-cell table:style-name="ce722" office:value-type="float" office:value="2" calcext:value-type="float">
            <text:p>2</text:p>
          </table:table-cell>
          <table:table-cell table:style-name="ce722" office:value-type="float" office:value="3" calcext:value-type="float">
            <text:p>3</text:p>
          </table:table-cell>
          <table:table-cell table:style-name="ce722" office:value-type="float" office:value="4" calcext:value-type="float">
            <text:p>4</text:p>
          </table:table-cell>
          <table:table-cell table:style-name="ce722" office:value-type="float" office:value="5" calcext:value-type="float">
            <text:p>5</text:p>
          </table:table-cell>
          <table:table-cell table:number-columns-repeated="2"/>
          <table:table-cell table:style-name="ce722" office:value-type="string" calcext:value-type="string">
            <text:p>CONCEPTO</text:p>
          </table:table-cell>
          <table:table-cell table:style-name="ce730" office:value-type="float" office:value="0" calcext:value-type="float">
            <text:p>0</text:p>
          </table:table-cell>
          <table:table-cell table:style-name="ce722" office:value-type="float" office:value="1" calcext:value-type="float">
            <text:p>1</text:p>
          </table:table-cell>
          <table:table-cell table:style-name="ce722" office:value-type="float" office:value="2" calcext:value-type="float">
            <text:p>2</text:p>
          </table:table-cell>
          <table:table-cell table:style-name="ce722" office:value-type="float" office:value="3" calcext:value-type="float">
            <text:p>3</text:p>
          </table:table-cell>
          <table:table-cell table:style-name="ce722" office:value-type="float" office:value="4" calcext:value-type="float">
            <text:p>4</text:p>
          </table:table-cell>
          <table:table-cell table:style-name="ce722" office:value-type="float" office:value="5" calcext:value-type="float">
            <text:p>5</text:p>
          </table:table-cell>
          <table:table-cell table:number-columns-repeated="2"/>
          <table:table-cell table:style-name="ce722" office:value-type="string" calcext:value-type="string">
            <text:p>CONCEPTO</text:p>
          </table:table-cell>
          <table:table-cell table:style-name="ce730" office:value-type="float" office:value="0" calcext:value-type="float">
            <text:p>0</text:p>
          </table:table-cell>
          <table:table-cell table:style-name="ce722" office:value-type="float" office:value="1" calcext:value-type="float">
            <text:p>1</text:p>
          </table:table-cell>
          <table:table-cell table:style-name="ce722" office:value-type="float" office:value="2" calcext:value-type="float">
            <text:p>2</text:p>
          </table:table-cell>
          <table:table-cell table:style-name="ce722" office:value-type="float" office:value="3" calcext:value-type="float">
            <text:p>3</text:p>
          </table:table-cell>
          <table:table-cell table:style-name="ce722" office:value-type="float" office:value="4" calcext:value-type="float">
            <text:p>4</text:p>
          </table:table-cell>
          <table:table-cell table:style-name="ce722" office:value-type="float" office:value="5" calcext:value-type="float">
            <text:p>5</text:p>
          </table:table-cell>
          <table:table-cell table:number-columns-repeated="2"/>
          <table:table-cell table:style-name="ce722" office:value-type="string" calcext:value-type="string">
            <text:p>CONCEPTO</text:p>
          </table:table-cell>
          <table:table-cell table:style-name="ce730" office:value-type="float" office:value="0" calcext:value-type="float">
            <text:p>0</text:p>
          </table:table-cell>
          <table:table-cell table:style-name="ce722" office:value-type="float" office:value="1" calcext:value-type="float">
            <text:p>1</text:p>
          </table:table-cell>
          <table:table-cell table:style-name="ce722" office:value-type="float" office:value="2" calcext:value-type="float">
            <text:p>2</text:p>
          </table:table-cell>
          <table:table-cell table:style-name="ce722" office:value-type="float" office:value="3" calcext:value-type="float">
            <text:p>3</text:p>
          </table:table-cell>
          <table:table-cell table:style-name="ce722" office:value-type="float" office:value="4" calcext:value-type="float">
            <text:p>4</text:p>
          </table:table-cell>
          <table:table-cell table:style-name="ce722" office:value-type="float" office:value="5" calcext:value-type="float">
            <text:p>5</text:p>
          </table:table-cell>
          <table:table-cell table:number-columns-repeated="2"/>
          <table:table-cell table:style-name="ce722" office:value-type="string" calcext:value-type="string">
            <text:p>CONCEPTO</text:p>
          </table:table-cell>
          <table:table-cell table:style-name="ce730" office:value-type="float" office:value="0" calcext:value-type="float">
            <text:p>0</text:p>
          </table:table-cell>
          <table:table-cell table:style-name="ce722" office:value-type="float" office:value="1" calcext:value-type="float">
            <text:p>1</text:p>
          </table:table-cell>
          <table:table-cell table:style-name="ce722" office:value-type="float" office:value="2" calcext:value-type="float">
            <text:p>2</text:p>
          </table:table-cell>
          <table:table-cell table:style-name="ce722" office:value-type="float" office:value="3" calcext:value-type="float">
            <text:p>3</text:p>
          </table:table-cell>
          <table:table-cell table:style-name="ce722" office:value-type="float" office:value="4" calcext:value-type="float">
            <text:p>4</text:p>
          </table:table-cell>
          <table:table-cell table:style-name="ce722" office:value-type="float" office:value="5" calcext:value-type="float">
            <text:p>5</text:p>
          </table:table-cell>
          <table:table-cell table:number-columns-repeated="2"/>
          <table:table-cell table:style-name="ce722" office:value-type="string" calcext:value-type="string">
            <text:p>CONCEPTO</text:p>
          </table:table-cell>
          <table:table-cell table:style-name="ce730" office:value-type="float" office:value="0" calcext:value-type="float">
            <text:p>0</text:p>
          </table:table-cell>
          <table:table-cell table:style-name="ce722" office:value-type="float" office:value="1" calcext:value-type="float">
            <text:p>1</text:p>
          </table:table-cell>
          <table:table-cell table:style-name="ce722" office:value-type="float" office:value="2" calcext:value-type="float">
            <text:p>2</text:p>
          </table:table-cell>
          <table:table-cell table:style-name="ce722" office:value-type="float" office:value="3" calcext:value-type="float">
            <text:p>3</text:p>
          </table:table-cell>
          <table:table-cell table:style-name="ce722" office:value-type="float" office:value="4" calcext:value-type="float">
            <text:p>4</text:p>
          </table:table-cell>
          <table:table-cell table:style-name="ce722" office:value-type="float" office:value="5" calcext:value-type="float">
            <text:p>5</text:p>
          </table:table-cell>
          <table:table-cell table:number-columns-repeated="2"/>
          <table:table-cell table:style-name="ce722" office:value-type="string" calcext:value-type="string">
            <text:p>CONCEPTO</text:p>
          </table:table-cell>
          <table:table-cell table:style-name="ce730" office:value-type="float" office:value="0" calcext:value-type="float">
            <text:p>0</text:p>
          </table:table-cell>
          <table:table-cell table:style-name="ce722" office:value-type="float" office:value="1" calcext:value-type="float">
            <text:p>1</text:p>
          </table:table-cell>
          <table:table-cell table:style-name="ce722" office:value-type="float" office:value="2" calcext:value-type="float">
            <text:p>2</text:p>
          </table:table-cell>
          <table:table-cell table:style-name="ce722" office:value-type="float" office:value="3" calcext:value-type="float">
            <text:p>3</text:p>
          </table:table-cell>
          <table:table-cell table:style-name="ce722" office:value-type="float" office:value="4" calcext:value-type="float">
            <text:p>4</text:p>
          </table:table-cell>
          <table:table-cell table:style-name="ce722" office:value-type="float" office:value="5" calcext:value-type="float">
            <text:p>5</text:p>
          </table:table-cell>
          <table:table-cell table:number-columns-repeated="16306"/>
        </table:table-row>
        <table:table-row table:style-name="ro14">
          <table:table-cell table:style-name="ce781" office:value-type="float" office:value="0" calcext:value-type="float">
            <text:p>0</text:p>
          </table:table-cell>
          <table:table-cell table:style-name="ce789" table:formula="of:=[$'FLUJO DE CAJA '.B23]" office:value-type="float" office:value="-140058.565385523" calcext:value-type="float">
            <text:p><text:s/>(140,058.57)</text:p>
          </table:table-cell>
          <table:table-cell table:style-name="ce792" table:formula="of:=1/(1+[.$B$1])^[.A5]" office:value-type="float" office:value="1" calcext:value-type="float">
            <text:p><text:s/>1.00 </text:p>
          </table:table-cell>
          <table:table-cell table:style-name="ce789" table:formula="of:=[.B5]*[.C5]" office:value-type="float" office:value="-140058.565385523" calcext:value-type="float">
            <text:p><text:s/>(140,058.57)</text:p>
          </table:table-cell>
          <table:table-cell table:style-name="ce783" table:number-columns-repeated="2"/>
          <table:table-cell table:style-name="ce781" office:value-type="float" office:value="0" calcext:value-type="float">
            <text:p>0</text:p>
          </table:table-cell>
          <table:table-cell table:style-name="ce789" table:formula="of:=[$'FLUJO DE CAJA '.B27]" office:value-type="float" office:value="-135058.565385523" calcext:value-type="float">
            <text:p><text:s/>(135,058.57)</text:p>
          </table:table-cell>
          <table:table-cell table:style-name="ce812" table:formula="of:=1/(1+[.$H$1])^[.G5]" office:value-type="float" office:value="1" calcext:value-type="float">
            <text:p><text:s/>1.00 </text:p>
          </table:table-cell>
          <table:table-cell table:style-name="ce789" table:formula="of:=[.H5]*[.I5]" office:value-type="float" office:value="-135058.565385523" calcext:value-type="float">
            <text:p><text:s/>(135,058.57)</text:p>
          </table:table-cell>
          <table:table-cell table:style-name="ce783" table:number-columns-repeated="2"/>
          <table:covered-table-cell table:number-columns-repeated="4" table:style-name="ce227"/>
          <table:table-cell/>
          <table:table-cell table:style-name="ce645" office:value-type="string" calcext:value-type="string">
            <text:p>I. INGRESOS</text:p>
          </table:table-cell>
          <table:table-cell table:style-name="ce731" table:formula="of:=SUM([.S6:.S7])" office:value-type="float" office:value="0" calcext:value-type="float">
            <text:p><text:s/>- <text:s text:c="2"/></text:p>
          </table:table-cell>
          <table:table-cell table:style-name="ce520" table:formula="of:=SUM([.T6:.T7])" office:value-type="float" office:value="57342.6795855458" calcext:value-type="float">
            <text:p><text:s/>57,342.68 </text:p>
          </table:table-cell>
          <table:table-cell table:style-name="ce520" table:formula="of:=SUM([.U6:.U7])" office:value-type="float" office:value="205986.528" calcext:value-type="float">
            <text:p><text:s/>205,986.53 </text:p>
          </table:table-cell>
          <table:table-cell table:style-name="ce520" table:formula="of:=SUM([.V6:.V7])" office:value-type="float" office:value="205986.528" calcext:value-type="float">
            <text:p><text:s/>205,986.53 </text:p>
          </table:table-cell>
          <table:table-cell table:style-name="ce520" table:formula="of:=SUM([.W6:.W7])" office:value-type="float" office:value="205986.528" calcext:value-type="float">
            <text:p><text:s/>205,986.53 </text:p>
          </table:table-cell>
          <table:table-cell table:style-name="ce520" table:formula="of:=SUM([.X6:.X8])" office:value-type="float" office:value="348993.329317727" calcext:value-type="float">
            <text:p><text:s/>348,993.33 </text:p>
          </table:table-cell>
          <table:table-cell table:number-columns-repeated="2"/>
          <table:table-cell table:style-name="ce645" office:value-type="string" calcext:value-type="string">
            <text:p>I. INGRESOS</text:p>
          </table:table-cell>
          <table:table-cell table:style-name="ce731" table:formula="of:=SUM([.AB6:.AB7])" office:value-type="float" office:value="0" calcext:value-type="float">
            <text:p><text:s/>- <text:s text:c="2"/></text:p>
          </table:table-cell>
          <table:table-cell table:style-name="ce520" table:formula="of:=SUM([.AC6:.AC7])" office:value-type="float" office:value="54475.5456062685" calcext:value-type="float">
            <text:p><text:s/>54,475.55 </text:p>
          </table:table-cell>
          <table:table-cell table:style-name="ce520" table:formula="of:=SUM([.AD6:.AD7])" office:value-type="float" office:value="195687.2016" calcext:value-type="float">
            <text:p><text:s/>195,687.20 </text:p>
          </table:table-cell>
          <table:table-cell table:style-name="ce520" table:formula="of:=SUM([.AE6:.AE7])" office:value-type="float" office:value="195687.2016" calcext:value-type="float">
            <text:p><text:s/>195,687.20 </text:p>
          </table:table-cell>
          <table:table-cell table:style-name="ce520" table:formula="of:=SUM([.AF6:.AF7])" office:value-type="float" office:value="195687.2016" calcext:value-type="float">
            <text:p><text:s/>195,687.20 </text:p>
          </table:table-cell>
          <table:table-cell table:style-name="ce520" table:formula="of:=SUM([.AG6:.AG8])" office:value-type="float" office:value="338694.002917727" calcext:value-type="float">
            <text:p><text:s/>338,694.00 </text:p>
          </table:table-cell>
          <table:table-cell table:number-columns-repeated="2"/>
          <table:table-cell table:style-name="ce645" office:value-type="string" calcext:value-type="string">
            <text:p>I. INGRESOS</text:p>
          </table:table-cell>
          <table:table-cell table:style-name="ce731" table:formula="of:=SUM([.AK6:.AK7])" office:value-type="float" office:value="0" calcext:value-type="float">
            <text:p><text:s/>- <text:s text:c="2"/></text:p>
          </table:table-cell>
          <table:table-cell table:style-name="ce520" table:formula="of:=SUM([.AL6:.AL7])" office:value-type="float" office:value="51608.4116269912" calcext:value-type="float">
            <text:p><text:s/>51,608.41 </text:p>
          </table:table-cell>
          <table:table-cell table:style-name="ce520" table:formula="of:=SUM([.AM6:.AM7])" office:value-type="float" office:value="185387.8752" calcext:value-type="float">
            <text:p><text:s/>185,387.88 </text:p>
          </table:table-cell>
          <table:table-cell table:style-name="ce520" table:formula="of:=SUM([.AN6:.AN7])" office:value-type="float" office:value="185387.8752" calcext:value-type="float">
            <text:p><text:s/>185,387.88 </text:p>
          </table:table-cell>
          <table:table-cell table:style-name="ce520" table:formula="of:=SUM([.AO6:.AO7])" office:value-type="float" office:value="185387.8752" calcext:value-type="float">
            <text:p><text:s/>185,387.88 </text:p>
          </table:table-cell>
          <table:table-cell table:style-name="ce520" table:formula="of:=SUM([.AP6:.AP8])" office:value-type="float" office:value="328394.676517727" calcext:value-type="float">
            <text:p><text:s/>328,394.68 </text:p>
          </table:table-cell>
          <table:table-cell table:number-columns-repeated="2"/>
          <table:table-cell table:style-name="ce645" office:value-type="string" calcext:value-type="string">
            <text:p>I. INGRESOS</text:p>
          </table:table-cell>
          <table:table-cell table:style-name="ce731" table:formula="of:=SUM([.AT6:.AT7])" office:value-type="float" office:value="0" calcext:value-type="float">
            <text:p><text:s/>- <text:s text:c="2"/></text:p>
          </table:table-cell>
          <table:table-cell table:style-name="ce520" table:formula="of:=SUM([.AU6:.AU7])" office:value-type="float" office:value="48741.2776477139" calcext:value-type="float">
            <text:p><text:s/>48,741.28 </text:p>
          </table:table-cell>
          <table:table-cell table:style-name="ce520" table:formula="of:=SUM([.AV6:.AV7])" office:value-type="float" office:value="175088.5488" calcext:value-type="float">
            <text:p><text:s/>175,088.55 </text:p>
          </table:table-cell>
          <table:table-cell table:style-name="ce520" table:formula="of:=SUM([.AW6:.AW7])" office:value-type="float" office:value="175088.5488" calcext:value-type="float">
            <text:p><text:s/>175,088.55 </text:p>
          </table:table-cell>
          <table:table-cell table:style-name="ce520" table:formula="of:=SUM([.AX6:.AX7])" office:value-type="float" office:value="175088.5488" calcext:value-type="float">
            <text:p><text:s/>175,088.55 </text:p>
          </table:table-cell>
          <table:table-cell table:style-name="ce520" table:formula="of:=SUM([.AY6:.AY8])" office:value-type="float" office:value="318095.350117727" calcext:value-type="float">
            <text:p><text:s/>318,095.35 </text:p>
          </table:table-cell>
          <table:table-cell table:number-columns-repeated="2"/>
          <table:table-cell table:style-name="ce645" office:value-type="string" calcext:value-type="string">
            <text:p>I. INGRESOS</text:p>
          </table:table-cell>
          <table:table-cell table:style-name="ce731" table:formula="of:=SUM([.BC6:.BC7])" office:value-type="float" office:value="0" calcext:value-type="float">
            <text:p><text:s/>- <text:s text:c="2"/></text:p>
          </table:table-cell>
          <table:table-cell table:style-name="ce520" table:formula="of:=SUM([.BD6:.BD7])" office:value-type="float" office:value="55622.3991979794" calcext:value-type="float">
            <text:p><text:s/>55,622.40 </text:p>
          </table:table-cell>
          <table:table-cell table:style-name="ce520" table:formula="of:=SUM([.BE6:.BE7])" office:value-type="float" office:value="199806.93216" calcext:value-type="float">
            <text:p><text:s/>199,806.93 </text:p>
          </table:table-cell>
          <table:table-cell table:style-name="ce520" table:formula="of:=SUM([.BF6:.BF7])" office:value-type="float" office:value="199806.93216" calcext:value-type="float">
            <text:p><text:s/>199,806.93 </text:p>
          </table:table-cell>
          <table:table-cell table:style-name="ce520" table:formula="of:=SUM([.BG6:.BG7])" office:value-type="float" office:value="199806.93216" calcext:value-type="float">
            <text:p><text:s/>199,806.93 </text:p>
          </table:table-cell>
          <table:table-cell table:style-name="ce520" table:formula="of:=SUM([.BH6:.BH8])" office:value-type="float" office:value="342813.733477727" calcext:value-type="float">
            <text:p><text:s/>342,813.73 </text:p>
          </table:table-cell>
          <table:table-cell table:number-columns-repeated="2"/>
          <table:table-cell table:style-name="ce645" office:value-type="string" calcext:value-type="string">
            <text:p>I. INGRESOS</text:p>
          </table:table-cell>
          <table:table-cell table:style-name="ce731" table:formula="of:=SUM([.BL6:.BL7])" office:value-type="float" office:value="0" calcext:value-type="float">
            <text:p><text:s/>- <text:s text:c="2"/></text:p>
          </table:table-cell>
          <table:table-cell table:style-name="ce520" table:formula="of:=SUM([.BM6:.BM7])" office:value-type="float" office:value="52755.2652187021" calcext:value-type="float">
            <text:p><text:s/>52,755.27 </text:p>
          </table:table-cell>
          <table:table-cell table:style-name="ce520" table:formula="of:=SUM([.BN6:.BN7])" office:value-type="float" office:value="189507.60576" calcext:value-type="float">
            <text:p><text:s/>189,507.61 </text:p>
          </table:table-cell>
          <table:table-cell table:style-name="ce520" table:formula="of:=SUM([.BO6:.BO7])" office:value-type="float" office:value="189507.60576" calcext:value-type="float">
            <text:p><text:s/>189,507.61 </text:p>
          </table:table-cell>
          <table:table-cell table:style-name="ce520" table:formula="of:=SUM([.BP6:.BP7])" office:value-type="float" office:value="189507.60576" calcext:value-type="float">
            <text:p><text:s/>189,507.61 </text:p>
          </table:table-cell>
          <table:table-cell table:style-name="ce520" table:formula="of:=SUM([.BQ6:.BQ8])" office:value-type="float" office:value="332514.407077727" calcext:value-type="float">
            <text:p><text:s/>332,514.41 </text:p>
          </table:table-cell>
          <table:table-cell table:number-columns-repeated="2"/>
          <table:table-cell table:style-name="ce645" office:value-type="string" calcext:value-type="string">
            <text:p>I. INGRESOS</text:p>
          </table:table-cell>
          <table:table-cell table:style-name="ce731" table:formula="of:=SUM([.BU6:.BU7])" office:value-type="float" office:value="0" calcext:value-type="float">
            <text:p><text:s/>- <text:s text:c="2"/></text:p>
          </table:table-cell>
          <table:table-cell table:style-name="ce520" table:formula="of:=SUM([.BV6:.BV7])" office:value-type="float" office:value="48167.8508518585" calcext:value-type="float">
            <text:p><text:s/>48,167.85 </text:p>
          </table:table-cell>
          <table:table-cell table:style-name="ce520" table:formula="of:=SUM([.BW6:.BW7])" office:value-type="float" office:value="173028.68352" calcext:value-type="float">
            <text:p><text:s/>173,028.68 </text:p>
          </table:table-cell>
          <table:table-cell table:style-name="ce520" table:formula="of:=SUM([.BX6:.BX7])" office:value-type="float" office:value="173028.68352" calcext:value-type="float">
            <text:p><text:s/>173,028.68 </text:p>
          </table:table-cell>
          <table:table-cell table:style-name="ce520" table:formula="of:=SUM([.BY6:.BY7])" office:value-type="float" office:value="173028.68352" calcext:value-type="float">
            <text:p><text:s/>173,028.68 </text:p>
          </table:table-cell>
          <table:table-cell table:style-name="ce520" table:formula="of:=SUM([.BZ6:.BZ8])" office:value-type="float" office:value="316035.484837727" calcext:value-type="float">
            <text:p><text:s/>316,035.48 </text:p>
          </table:table-cell>
          <table:table-cell table:number-columns-repeated="16306"/>
        </table:table-row>
        <table:table-row table:style-name="ro1">
          <table:table-cell table:style-name="ce781" office:value-type="float" office:value="1" calcext:value-type="float">
            <text:p>1</text:p>
          </table:table-cell>
          <table:table-cell table:style-name="ce789" table:formula="of:=[$'FLUJO DE CAJA '.C23]" office:value-type="float" office:value="6837.49080061387" calcext:value-type="float">
            <text:p><text:s/>6,837.49 </text:p>
          </table:table-cell>
          <table:table-cell table:style-name="ce792" table:formula="of:=1/(1+[.$B$1])^[.A6]" office:value-type="float" office:value="0.835620384800877" calcext:value-type="float">
            <text:p><text:s/>0.84 </text:p>
          </table:table-cell>
          <table:table-cell table:style-name="ce789" table:formula="of:=[.B6]*[.C6]" office:value-type="float" office:value="5713.54669388142" calcext:value-type="float">
            <text:p><text:s/>5,713.55 </text:p>
          </table:table-cell>
          <table:table-cell table:style-name="ce783" table:number-columns-repeated="2"/>
          <table:table-cell table:style-name="ce781" office:value-type="float" office:value="1" calcext:value-type="float">
            <text:p>1</text:p>
          </table:table-cell>
          <table:table-cell table:style-name="ce789" table:formula="of:=[$'FLUJO DE CAJA '.C27]" office:value-type="float" office:value="1565.28755242112" calcext:value-type="float">
            <text:p><text:s/>1,565.29 </text:p>
          </table:table-cell>
          <table:table-cell table:style-name="ce812" table:formula="of:=1/(1+[.$H$1])^[.G6]" office:value-type="float" office:value="0.833333333333333" calcext:value-type="float">
            <text:p><text:s/>0.83 </text:p>
          </table:table-cell>
          <table:table-cell table:style-name="ce789" table:formula="of:=[.H6]*[.I6]" office:value-type="float" office:value="1304.40629368426" calcext:value-type="float">
            <text:p><text:s/>1,304.41 </text:p>
          </table:table-cell>
          <table:table-cell table:style-name="ce783" table:number-columns-repeated="2"/>
          <table:table-cell table:style-name="ce224" table:formula="of:=+[$'PLAN DE PRODUCCION'.B22]" office:value-type="float" office:value="2021" calcext:value-type="float">
            <text:p>2021</text:p>
          </table:table-cell>
          <table:table-cell table:style-name="ce818" table:formula="of:=+[$'PLAN DE PRODUCCION'.C22]*[.$N$3]" office:value-type="float" office:value="3185.70442141921" calcext:value-type="float">
            <text:p>3185.70</text:p>
          </table:table-cell>
          <table:table-cell table:style-name="ce818" table:formula="of:=+[$'PLAN DE PRODUCCION'.D22]*[.$O$3]" office:value-type="float" office:value="18" calcext:value-type="float">
            <text:p>18.00</text:p>
          </table:table-cell>
          <table:table-cell table:style-name="ce818" table:formula="of:=[.N6]*[.O6]" office:value-type="float" office:value="57342.6795855458" calcext:value-type="float">
            <text:p>57342.68</text:p>
          </table:table-cell>
          <table:table-cell/>
          <table:table-cell table:style-name="ce656" office:value-type="string" calcext:value-type="string">
            <text:p><text:s/>INGRESOS POR VENTA</text:p>
          </table:table-cell>
          <table:table-cell table:style-name="ce732"/>
          <table:table-cell table:style-name="ce832" table:formula="of:=+[.P6]" office:value-type="float" office:value="57342.6795855458" calcext:value-type="float">
            <text:p><text:s/>57,342.68 </text:p>
          </table:table-cell>
          <table:table-cell table:style-name="ce832" table:formula="of:=+[.P7]" office:value-type="float" office:value="205986.528" calcext:value-type="float">
            <text:p><text:s/>205,986.53 </text:p>
          </table:table-cell>
          <table:table-cell table:style-name="ce832" table:formula="of:=+[.P8]" office:value-type="float" office:value="205986.528" calcext:value-type="float">
            <text:p><text:s/>205,986.53 </text:p>
          </table:table-cell>
          <table:table-cell table:style-name="ce832" table:formula="of:=+[.P9]" office:value-type="float" office:value="205986.528" calcext:value-type="float">
            <text:p><text:s/>205,986.53 </text:p>
          </table:table-cell>
          <table:table-cell table:style-name="ce521" table:formula="of:=+[$'ESTADO GyP'.$F$9]+[$'ANALISIS SESIB'.Y6]" office:value-type="float" office:value="275403.205966102" calcext:value-type="float">
            <text:p><text:s/>275,403.21 </text:p>
          </table:table-cell>
          <table:table-cell table:style-name="ce835" table:formula="of:=+[.P10]" office:value-type="float" office:value="205986.528" calcext:value-type="float">
            <text:p><text:s/>205,986.53 </text:p>
          </table:table-cell>
          <table:table-cell/>
          <table:table-cell table:style-name="ce656" office:value-type="string" calcext:value-type="string">
            <text:p><text:s/>INGRESOS POR VENTA</text:p>
          </table:table-cell>
          <table:table-cell table:style-name="ce732"/>
          <table:table-cell table:style-name="ce832" table:formula="of:=+[.P18]" office:value-type="float" office:value="54475.5456062685" calcext:value-type="float">
            <text:p><text:s/>54,475.55 </text:p>
          </table:table-cell>
          <table:table-cell table:style-name="ce832" table:formula="of:=+[.P19]" office:value-type="float" office:value="195687.2016" calcext:value-type="float">
            <text:p><text:s/>195,687.20 </text:p>
          </table:table-cell>
          <table:table-cell table:style-name="ce832" table:formula="of:=+[.P20]" office:value-type="float" office:value="195687.2016" calcext:value-type="float">
            <text:p><text:s/>195,687.20 </text:p>
          </table:table-cell>
          <table:table-cell table:style-name="ce832" table:formula="of:=+[.P21]" office:value-type="float" office:value="195687.2016" calcext:value-type="float">
            <text:p><text:s/>195,687.20 </text:p>
          </table:table-cell>
          <table:table-cell table:style-name="ce521" table:formula="of:=+[$'ESTADO GyP'.$F$9]+[$'ANALISIS SESIB'.AH6]" office:value-type="float" office:value="265103.879566102" calcext:value-type="float">
            <text:p><text:s/>265,103.88 </text:p>
          </table:table-cell>
          <table:table-cell table:style-name="ce835" table:formula="of:=+[.P22]" office:value-type="float" office:value="195687.2016" calcext:value-type="float">
            <text:p><text:s/>195,687.20 </text:p>
          </table:table-cell>
          <table:table-cell/>
          <table:table-cell table:style-name="ce656" office:value-type="string" calcext:value-type="string">
            <text:p><text:s/>INGRESOS POR VENTA</text:p>
          </table:table-cell>
          <table:table-cell table:style-name="ce732"/>
          <table:table-cell table:style-name="ce832" table:formula="of:=+[.P29]" office:value-type="float" office:value="51608.4116269912" calcext:value-type="float">
            <text:p><text:s/>51,608.41 </text:p>
          </table:table-cell>
          <table:table-cell table:style-name="ce832" table:formula="of:=+[.P30]" office:value-type="float" office:value="185387.8752" calcext:value-type="float">
            <text:p><text:s/>185,387.88 </text:p>
          </table:table-cell>
          <table:table-cell table:style-name="ce832" table:formula="of:=+[.P31]" office:value-type="float" office:value="185387.8752" calcext:value-type="float">
            <text:p><text:s/>185,387.88 </text:p>
          </table:table-cell>
          <table:table-cell table:style-name="ce832" table:formula="of:=+[.P32]" office:value-type="float" office:value="185387.8752" calcext:value-type="float">
            <text:p><text:s/>185,387.88 </text:p>
          </table:table-cell>
          <table:table-cell table:style-name="ce521" table:formula="of:=+[$'ESTADO GyP'.$F$9]+[$'ANALISIS SESIB'.AQ6]" office:value-type="float" office:value="254804.553166102" calcext:value-type="float">
            <text:p><text:s/>254,804.55 </text:p>
          </table:table-cell>
          <table:table-cell table:style-name="ce835" table:formula="of:=+[.P33]" office:value-type="float" office:value="185387.8752" calcext:value-type="float">
            <text:p><text:s/>185,387.88 </text:p>
          </table:table-cell>
          <table:table-cell/>
          <table:table-cell table:style-name="ce656" office:value-type="string" calcext:value-type="string">
            <text:p><text:s/>INGRESOS POR VENTA</text:p>
          </table:table-cell>
          <table:table-cell table:style-name="ce732"/>
          <table:table-cell table:style-name="ce832" table:formula="of:=+[.P40]" office:value-type="float" office:value="48741.2776477139" calcext:value-type="float">
            <text:p><text:s/>48,741.28 </text:p>
          </table:table-cell>
          <table:table-cell table:style-name="ce832" table:formula="of:=+[.P41]" office:value-type="float" office:value="175088.5488" calcext:value-type="float">
            <text:p><text:s/>175,088.55 </text:p>
          </table:table-cell>
          <table:table-cell table:style-name="ce832" table:formula="of:=+[.P42]" office:value-type="float" office:value="175088.5488" calcext:value-type="float">
            <text:p><text:s/>175,088.55 </text:p>
          </table:table-cell>
          <table:table-cell table:style-name="ce832" table:formula="of:=+[.P43]" office:value-type="float" office:value="175088.5488" calcext:value-type="float">
            <text:p><text:s/>175,088.55 </text:p>
          </table:table-cell>
          <table:table-cell table:style-name="ce521" table:formula="of:=+[$'ESTADO GyP'.$F$9]+[$'ANALISIS SESIB'.AZ6]" office:value-type="float" office:value="244505.226766102" calcext:value-type="float">
            <text:p><text:s/>244,505.23 </text:p>
          </table:table-cell>
          <table:table-cell table:style-name="ce835" table:formula="of:=+[.P44]" office:value-type="float" office:value="175088.5488" calcext:value-type="float">
            <text:p><text:s/>175,088.55 </text:p>
          </table:table-cell>
          <table:table-cell/>
          <table:table-cell table:style-name="ce656" office:value-type="string" calcext:value-type="string">
            <text:p><text:s/>INGRESOS POR VENTA</text:p>
          </table:table-cell>
          <table:table-cell table:style-name="ce732"/>
          <table:table-cell table:style-name="ce832" table:formula="of:=+[.P51]" office:value-type="float" office:value="55622.3991979794" calcext:value-type="float">
            <text:p><text:s/>55,622.40 </text:p>
          </table:table-cell>
          <table:table-cell table:style-name="ce832" table:formula="of:=+[.P52]" office:value-type="float" office:value="199806.93216" calcext:value-type="float">
            <text:p><text:s/>199,806.93 </text:p>
          </table:table-cell>
          <table:table-cell table:style-name="ce832" table:formula="of:=+[.P53]" office:value-type="float" office:value="199806.93216" calcext:value-type="float">
            <text:p><text:s/>199,806.93 </text:p>
          </table:table-cell>
          <table:table-cell table:style-name="ce832" table:formula="of:=+[.P54]" office:value-type="float" office:value="199806.93216" calcext:value-type="float">
            <text:p><text:s/>199,806.93 </text:p>
          </table:table-cell>
          <table:table-cell table:style-name="ce521" table:formula="of:=+[$'ESTADO GyP'.$F$9]+[$'ANALISIS SESIB'.BI6]" office:value-type="float" office:value="269223.610126102" calcext:value-type="float">
            <text:p><text:s/>269,223.61 </text:p>
          </table:table-cell>
          <table:table-cell table:style-name="ce835" table:formula="of:=+[.P55]" office:value-type="float" office:value="199806.93216" calcext:value-type="float">
            <text:p><text:s/>199,806.93 </text:p>
          </table:table-cell>
          <table:table-cell/>
          <table:table-cell table:style-name="ce656" office:value-type="string" calcext:value-type="string">
            <text:p><text:s/>INGRESOS POR VENTA</text:p>
          </table:table-cell>
          <table:table-cell table:style-name="ce732"/>
          <table:table-cell table:style-name="ce832" table:formula="of:=+[.P62]" office:value-type="float" office:value="52755.2652187021" calcext:value-type="float">
            <text:p><text:s/>52,755.27 </text:p>
          </table:table-cell>
          <table:table-cell table:style-name="ce832" table:formula="of:=+[.P63]" office:value-type="float" office:value="189507.60576" calcext:value-type="float">
            <text:p><text:s/>189,507.61 </text:p>
          </table:table-cell>
          <table:table-cell table:style-name="ce832" table:formula="of:=+[.P64]" office:value-type="float" office:value="189507.60576" calcext:value-type="float">
            <text:p><text:s/>189,507.61 </text:p>
          </table:table-cell>
          <table:table-cell table:style-name="ce832" table:formula="of:=+[.P65]" office:value-type="float" office:value="189507.60576" calcext:value-type="float">
            <text:p><text:s/>189,507.61 </text:p>
          </table:table-cell>
          <table:table-cell table:style-name="ce521" table:formula="of:=+[$'ESTADO GyP'.$F$9]+[$'ANALISIS SESIB'.BR6]" office:value-type="float" office:value="258924.283726102" calcext:value-type="float">
            <text:p><text:s/>258,924.28 </text:p>
          </table:table-cell>
          <table:table-cell table:style-name="ce835" table:formula="of:=+[.P66]" office:value-type="float" office:value="189507.60576" calcext:value-type="float">
            <text:p><text:s/>189,507.61 </text:p>
          </table:table-cell>
          <table:table-cell/>
          <table:table-cell table:style-name="ce656" office:value-type="string" calcext:value-type="string">
            <text:p><text:s/>INGRESOS POR VENTA</text:p>
          </table:table-cell>
          <table:table-cell table:style-name="ce732"/>
          <table:table-cell table:style-name="ce832" table:formula="of:=+[.P73]" office:value-type="float" office:value="48167.8508518585" calcext:value-type="float">
            <text:p><text:s/>48,167.85 </text:p>
          </table:table-cell>
          <table:table-cell table:style-name="ce832" table:formula="of:=+[.P74]" office:value-type="float" office:value="173028.68352" calcext:value-type="float">
            <text:p><text:s/>173,028.68 </text:p>
          </table:table-cell>
          <table:table-cell table:style-name="ce832" table:formula="of:=+[.P75]" office:value-type="float" office:value="173028.68352" calcext:value-type="float">
            <text:p><text:s/>173,028.68 </text:p>
          </table:table-cell>
          <table:table-cell table:style-name="ce832" table:formula="of:=+[.P76]" office:value-type="float" office:value="173028.68352" calcext:value-type="float">
            <text:p><text:s/>173,028.68 </text:p>
          </table:table-cell>
          <table:table-cell table:style-name="ce521" table:formula="of:=+[$'ESTADO GyP'.$F$9]+[$'ANALISIS SESIB'.CA6]" office:value-type="float" office:value="242445.361486102" calcext:value-type="float">
            <text:p><text:s/>242,445.36 </text:p>
          </table:table-cell>
          <table:table-cell table:style-name="ce835" table:formula="of:=+[.P77]" office:value-type="float" office:value="173028.68352" calcext:value-type="float">
            <text:p><text:s/>173,028.68 </text:p>
          </table:table-cell>
          <table:table-cell table:number-columns-repeated="16305"/>
        </table:table-row>
        <table:table-row table:style-name="ro1">
          <table:table-cell table:style-name="ce781" office:value-type="float" office:value="2" calcext:value-type="float">
            <text:p>2</text:p>
          </table:table-cell>
          <table:table-cell table:style-name="ce789" table:formula="of:=[$'FLUJO DE CAJA '.D23]" office:value-type="float" office:value="61011.0534466275" calcext:value-type="float">
            <text:p><text:s/>61,011.05 </text:p>
          </table:table-cell>
          <table:table-cell table:style-name="ce792" table:formula="of:=1/(1+[.$B$1])^[.A7]" office:value-type="float" office:value="0.698261427494766" calcext:value-type="float">
            <text:p><text:s/>0.70 </text:p>
          </table:table-cell>
          <table:table-cell table:style-name="ce789" table:formula="of:=[.B7]*[.C7]" office:value-type="float" office:value="42601.6652726015" calcext:value-type="float">
            <text:p><text:s/>42,601.67 </text:p>
          </table:table-cell>
          <table:table-cell table:style-name="ce783" table:number-columns-repeated="2"/>
          <table:table-cell table:style-name="ce781" office:value-type="float" office:value="2" calcext:value-type="float">
            <text:p>2</text:p>
          </table:table-cell>
          <table:table-cell table:style-name="ce789" table:formula="of:=[$'FLUJO DE CAJA '.D27]" office:value-type="float" office:value="61011.0534466275" calcext:value-type="float">
            <text:p><text:s/>61,011.05 </text:p>
          </table:table-cell>
          <table:table-cell table:style-name="ce812" table:formula="of:=1/(1+[.$H$1])^[.G7]" office:value-type="float" office:value="0.694444444444444" calcext:value-type="float">
            <text:p><text:s/>0.69 </text:p>
          </table:table-cell>
          <table:table-cell table:style-name="ce789" table:formula="of:=[.H7]*[.I7]" office:value-type="float" office:value="42368.7871157135" calcext:value-type="float">
            <text:p><text:s/>42,368.79 </text:p>
          </table:table-cell>
          <table:table-cell table:style-name="ce783" table:number-columns-repeated="2"/>
          <table:table-cell table:style-name="ce224" table:formula="of:=+[$'PLAN DE PRODUCCION'.B23]" office:value-type="float" office:value="2022" calcext:value-type="float">
            <text:p>2022</text:p>
          </table:table-cell>
          <table:table-cell table:style-name="ce818" table:formula="of:=+[$'PLAN DE PRODUCCION'.C23]*[.$N$3]" office:value-type="float" office:value="11443.696" calcext:value-type="float">
            <text:p>11443.70</text:p>
          </table:table-cell>
          <table:table-cell table:style-name="ce818" table:formula="of:=+[$'PLAN DE PRODUCCION'.D23]*[.$O$3]" office:value-type="float" office:value="18" calcext:value-type="float">
            <text:p>18.00</text:p>
          </table:table-cell>
          <table:table-cell table:style-name="ce818" table:formula="of:=[.N7]*[.O7]" office:value-type="float" office:value="205986.528" calcext:value-type="float">
            <text:p>205986.53</text:p>
          </table:table-cell>
          <table:table-cell/>
          <table:table-cell table:style-name="ce656" office:value-type="string" calcext:value-type="string">
            <text:p>VALOR RESIDUAL</text:p>
          </table:table-cell>
          <table:table-cell table:style-name="ce732"/>
          <table:table-cell table:style-name="ce521" table:number-columns-repeated="4"/>
          <table:table-cell table:style-name="ce521" table:formula="of:=+[$'FLUJO DE CAJA '.G11]" office:value-type="float" office:value="69416.6779661017" calcext:value-type="float">
            <text:p><text:s/>69,416.68 </text:p>
          </table:table-cell>
          <table:table-cell table:number-columns-repeated="2"/>
          <table:table-cell table:style-name="ce656" office:value-type="string" calcext:value-type="string">
            <text:p>VALOR RESIDUAL</text:p>
          </table:table-cell>
          <table:table-cell table:style-name="ce732"/>
          <table:table-cell table:style-name="ce521" table:number-columns-repeated="4"/>
          <table:table-cell table:style-name="ce521" table:formula="of:=+[.X7]" office:value-type="float" office:value="69416.6779661017" calcext:value-type="float">
            <text:p><text:s/>69,416.68 </text:p>
          </table:table-cell>
          <table:table-cell table:number-columns-repeated="2"/>
          <table:table-cell table:style-name="ce656" office:value-type="string" calcext:value-type="string">
            <text:p>VALOR RESIDUAL</text:p>
          </table:table-cell>
          <table:table-cell table:style-name="ce732"/>
          <table:table-cell table:style-name="ce521" table:number-columns-repeated="4"/>
          <table:table-cell table:style-name="ce521" table:formula="of:=+[.AG7]" office:value-type="float" office:value="69416.6779661017" calcext:value-type="float">
            <text:p><text:s/>69,416.68 </text:p>
          </table:table-cell>
          <table:table-cell table:number-columns-repeated="2"/>
          <table:table-cell table:style-name="ce656" office:value-type="string" calcext:value-type="string">
            <text:p>VALOR RESIDUAL</text:p>
          </table:table-cell>
          <table:table-cell table:style-name="ce732"/>
          <table:table-cell table:style-name="ce521" table:number-columns-repeated="4"/>
          <table:table-cell table:style-name="ce521" table:formula="of:=+[.AP7]" office:value-type="float" office:value="69416.6779661017" calcext:value-type="float">
            <text:p><text:s/>69,416.68 </text:p>
          </table:table-cell>
          <table:table-cell table:number-columns-repeated="2"/>
          <table:table-cell table:style-name="ce656" office:value-type="string" calcext:value-type="string">
            <text:p>VALOR RESIDUAL</text:p>
          </table:table-cell>
          <table:table-cell table:style-name="ce732"/>
          <table:table-cell table:style-name="ce521" table:number-columns-repeated="4"/>
          <table:table-cell table:style-name="ce521" table:formula="of:=+[.AY7]" office:value-type="float" office:value="69416.6779661017" calcext:value-type="float">
            <text:p><text:s/>69,416.68 </text:p>
          </table:table-cell>
          <table:table-cell table:number-columns-repeated="2"/>
          <table:table-cell table:style-name="ce656" office:value-type="string" calcext:value-type="string">
            <text:p>VALOR RESIDUAL</text:p>
          </table:table-cell>
          <table:table-cell table:style-name="ce732"/>
          <table:table-cell table:style-name="ce521" table:number-columns-repeated="4"/>
          <table:table-cell table:style-name="ce521" table:formula="of:=+[.BH7]" office:value-type="float" office:value="69416.6779661017" calcext:value-type="float">
            <text:p><text:s/>69,416.68 </text:p>
          </table:table-cell>
          <table:table-cell table:number-columns-repeated="2"/>
          <table:table-cell table:style-name="ce656" office:value-type="string" calcext:value-type="string">
            <text:p>VALOR RESIDUAL</text:p>
          </table:table-cell>
          <table:table-cell table:style-name="ce732"/>
          <table:table-cell table:style-name="ce521" table:number-columns-repeated="4"/>
          <table:table-cell table:style-name="ce521" table:formula="of:=+[.BQ7]" office:value-type="float" office:value="69416.6779661017" calcext:value-type="float">
            <text:p><text:s/>69,416.68 </text:p>
          </table:table-cell>
          <table:table-cell table:number-columns-repeated="16306"/>
        </table:table-row>
        <table:table-row table:style-name="ro1">
          <table:table-cell table:style-name="ce781" office:value-type="float" office:value="3" calcext:value-type="float">
            <text:p>3</text:p>
          </table:table-cell>
          <table:table-cell table:style-name="ce789" table:formula="of:=[$'FLUJO DE CAJA '.E23]" office:value-type="float" office:value="60814.9526592795" calcext:value-type="float">
            <text:p><text:s/>60,814.95 </text:p>
          </table:table-cell>
          <table:table-cell table:style-name="ce792" table:formula="of:=1/(1+[.$B$1])^[.A8]" office:value-type="float" office:value="0.583481482734786" calcext:value-type="float">
            <text:p><text:s/>0.58 </text:p>
          </table:table-cell>
          <table:table-cell table:style-name="ce789" table:formula="of:=[.B8]*[.C8]" office:value-type="float" office:value="35484.3987500822" calcext:value-type="float">
            <text:p><text:s/>35,484.40 </text:p>
          </table:table-cell>
          <table:table-cell table:style-name="ce783" table:number-columns-repeated="2"/>
          <table:table-cell table:style-name="ce781" office:value-type="float" office:value="3" calcext:value-type="float">
            <text:p>3</text:p>
          </table:table-cell>
          <table:table-cell table:style-name="ce789" table:formula="of:=[$'FLUJO DE CAJA '.E27]" office:value-type="float" office:value="60814.9526592795" calcext:value-type="float">
            <text:p><text:s/>60,814.95 </text:p>
          </table:table-cell>
          <table:table-cell table:style-name="ce812" table:formula="of:=1/(1+[.$H$1])^[.G8]" office:value-type="float" office:value="0.578703703703704" calcext:value-type="float">
            <text:p><text:s/>0.58 </text:p>
          </table:table-cell>
          <table:table-cell table:style-name="ce789" table:formula="of:=[.H8]*[.I8]" office:value-type="float" office:value="35193.8383444905" calcext:value-type="float">
            <text:p><text:s/>35,193.84 </text:p>
          </table:table-cell>
          <table:table-cell table:style-name="ce783" table:number-columns-repeated="2"/>
          <table:table-cell table:style-name="ce224" table:formula="of:=+[$'PLAN DE PRODUCCION'.B24]" office:value-type="float" office:value="2023" calcext:value-type="float">
            <text:p>2023</text:p>
          </table:table-cell>
          <table:table-cell table:style-name="ce818" table:formula="of:=+[$'PLAN DE PRODUCCION'.C24]*[.$N$3]" office:value-type="float" office:value="11443.696" calcext:value-type="float">
            <text:p>11443.70</text:p>
          </table:table-cell>
          <table:table-cell table:style-name="ce818" table:formula="of:=+[$'PLAN DE PRODUCCION'.D24]*[.$O$3]" office:value-type="float" office:value="18" calcext:value-type="float">
            <text:p>18.00</text:p>
          </table:table-cell>
          <table:table-cell table:style-name="ce818" table:formula="of:=[.N8]*[.O8]" office:value-type="float" office:value="205986.528" calcext:value-type="float">
            <text:p>205986.53</text:p>
          </table:table-cell>
          <table:table-cell/>
          <table:table-cell table:style-name="ce656" office:value-type="string" calcext:value-type="string">
            <text:p>RECUPERO CAPITAL DE TRABAJO</text:p>
          </table:table-cell>
          <table:table-cell table:style-name="ce732"/>
          <table:table-cell table:style-name="ce521" table:number-columns-repeated="4"/>
          <table:table-cell table:style-name="ce521" table:formula="of:=[.S16]" office:value-type="float" office:value="4173.44538552312" calcext:value-type="float">
            <text:p><text:s/>4,173.45 </text:p>
          </table:table-cell>
          <table:table-cell table:number-columns-repeated="2"/>
          <table:table-cell table:style-name="ce656" office:value-type="string" calcext:value-type="string">
            <text:p>RECUPERO CAPITAL DE TRABAJO</text:p>
          </table:table-cell>
          <table:table-cell table:style-name="ce732"/>
          <table:table-cell table:style-name="ce521" table:number-columns-repeated="4"/>
          <table:table-cell table:style-name="ce521" table:formula="of:=[.AB16]" office:value-type="float" office:value="4173.44538552312" calcext:value-type="float">
            <text:p><text:s/>4,173.45 </text:p>
          </table:table-cell>
          <table:table-cell table:number-columns-repeated="2"/>
          <table:table-cell table:style-name="ce656" office:value-type="string" calcext:value-type="string">
            <text:p>RECUPERO CAPITAL DE TRABAJO</text:p>
          </table:table-cell>
          <table:table-cell table:style-name="ce732"/>
          <table:table-cell table:style-name="ce521" table:number-columns-repeated="4"/>
          <table:table-cell table:style-name="ce521" table:formula="of:=[.AK16]" office:value-type="float" office:value="4173.44538552312" calcext:value-type="float">
            <text:p><text:s/>4,173.45 </text:p>
          </table:table-cell>
          <table:table-cell table:number-columns-repeated="2"/>
          <table:table-cell table:style-name="ce656" office:value-type="string" calcext:value-type="string">
            <text:p>RECUPERO CAPITAL DE TRABAJO</text:p>
          </table:table-cell>
          <table:table-cell table:style-name="ce732"/>
          <table:table-cell table:style-name="ce521" table:number-columns-repeated="4"/>
          <table:table-cell table:style-name="ce521" table:formula="of:=[.AT16]" office:value-type="float" office:value="4173.44538552312" calcext:value-type="float">
            <text:p><text:s/>4,173.45 </text:p>
          </table:table-cell>
          <table:table-cell table:number-columns-repeated="2"/>
          <table:table-cell table:style-name="ce656" office:value-type="string" calcext:value-type="string">
            <text:p>RECUPERO CAPITAL DE TRABAJO</text:p>
          </table:table-cell>
          <table:table-cell table:style-name="ce732"/>
          <table:table-cell table:style-name="ce521" table:number-columns-repeated="4"/>
          <table:table-cell table:style-name="ce521" table:formula="of:=[.BC16]" office:value-type="float" office:value="4173.44538552312" calcext:value-type="float">
            <text:p><text:s/>4,173.45 </text:p>
          </table:table-cell>
          <table:table-cell table:number-columns-repeated="2"/>
          <table:table-cell table:style-name="ce656" office:value-type="string" calcext:value-type="string">
            <text:p>RECUPERO CAPITAL DE TRABAJO</text:p>
          </table:table-cell>
          <table:table-cell table:style-name="ce732"/>
          <table:table-cell table:style-name="ce521" table:number-columns-repeated="4"/>
          <table:table-cell table:style-name="ce521" table:formula="of:=[.BL16]" office:value-type="float" office:value="4173.44538552312" calcext:value-type="float">
            <text:p><text:s/>4,173.45 </text:p>
          </table:table-cell>
          <table:table-cell table:number-columns-repeated="2"/>
          <table:table-cell table:style-name="ce656" office:value-type="string" calcext:value-type="string">
            <text:p>RECUPERO CAPITAL DE TRABAJO</text:p>
          </table:table-cell>
          <table:table-cell table:style-name="ce732"/>
          <table:table-cell table:style-name="ce521" table:number-columns-repeated="4"/>
          <table:table-cell table:style-name="ce521" table:formula="of:=[.BU16]" office:value-type="float" office:value="4173.44538552312" calcext:value-type="float">
            <text:p><text:s/>4,173.45 </text:p>
          </table:table-cell>
          <table:table-cell table:number-columns-repeated="16306"/>
        </table:table-row>
        <table:table-row table:style-name="ro1">
          <table:table-cell table:style-name="ce781" office:value-type="float" office:value="4" calcext:value-type="float">
            <text:p>4</text:p>
          </table:table-cell>
          <table:table-cell table:style-name="ce789" table:formula="of:=[$'FLUJO DE CAJA '.F23]" office:value-type="float" office:value="60579.631714462" calcext:value-type="float">
            <text:p><text:s/>60,579.63 </text:p>
          </table:table-cell>
          <table:table-cell table:style-name="ce792" table:formula="of:=1/(1+[.$B$1])^[.A9]" office:value-type="float" office:value="0.487569021127028" calcext:value-type="float">
            <text:p><text:s/>0.49 </text:p>
          </table:table-cell>
          <table:table-cell table:style-name="ce789" table:formula="of:=[.B9]*[.C9]" office:value-type="float" office:value="29536.7517352561" calcext:value-type="float">
            <text:p><text:s/>29,536.75 </text:p>
          </table:table-cell>
          <table:table-cell table:style-name="ce783" table:number-columns-repeated="2"/>
          <table:table-cell table:style-name="ce781" office:value-type="float" office:value="4" calcext:value-type="float">
            <text:p>4</text:p>
          </table:table-cell>
          <table:table-cell table:style-name="ce789" table:formula="of:=[$'FLUJO DE CAJA '.F27]" office:value-type="float" office:value="60579.631714462" calcext:value-type="float">
            <text:p><text:s/>60,579.63 </text:p>
          </table:table-cell>
          <table:table-cell table:style-name="ce812" table:formula="of:=1/(1+[.$H$1])^[.G9]" office:value-type="float" office:value="0.482253086419753" calcext:value-type="float">
            <text:p><text:s/>0.48 </text:p>
          </table:table-cell>
          <table:table-cell table:style-name="ce789" table:formula="of:=[.H9]*[.I9]" office:value-type="float" office:value="29214.7143684713" calcext:value-type="float">
            <text:p><text:s/>29,214.71 </text:p>
          </table:table-cell>
          <table:table-cell table:style-name="ce783" table:number-columns-repeated="2"/>
          <table:table-cell table:style-name="ce224" table:formula="of:=+[$'PLAN DE PRODUCCION'.B25]" office:value-type="float" office:value="2024" calcext:value-type="float">
            <text:p>2024</text:p>
          </table:table-cell>
          <table:table-cell table:style-name="ce818" table:formula="of:=+[$'PLAN DE PRODUCCION'.C25]*[.$N$3]" office:value-type="float" office:value="11443.696" calcext:value-type="float">
            <text:p>11443.70</text:p>
          </table:table-cell>
          <table:table-cell table:style-name="ce818" table:formula="of:=+[$'PLAN DE PRODUCCION'.D25]*[.$O$3]" office:value-type="float" office:value="18" calcext:value-type="float">
            <text:p>18.00</text:p>
          </table:table-cell>
          <table:table-cell table:style-name="ce818" table:formula="of:=[.N9]*[.O9]" office:value-type="float" office:value="205986.528" calcext:value-type="float">
            <text:p>205986.53</text:p>
          </table:table-cell>
          <table:table-cell/>
          <table:table-cell table:style-name="ce645" office:value-type="string" calcext:value-type="string">
            <text:p>II. EGRESOS</text:p>
          </table:table-cell>
          <table:table-cell table:style-name="ce731" table:formula="of:=-SUM([.S10:.S12])" office:value-type="float" office:value="0" calcext:value-type="float">
            <text:p><text:s/>- <text:s text:c="2"/></text:p>
          </table:table-cell>
          <table:table-cell table:style-name="ce520" table:formula="of:=SUM([.T10:.T16])" office:value-type="float" office:value="-50505.1887849319" calcext:value-type="float">
            <text:p><text:s/>(50,505.19)</text:p>
          </table:table-cell>
          <table:table-cell table:style-name="ce520" table:formula="of:=SUM([.U10:.U16])" office:value-type="float" office:value="-144975.474553373" calcext:value-type="float">
            <text:p><text:s/>(144,975.47)</text:p>
          </table:table-cell>
          <table:table-cell table:style-name="ce520" table:formula="of:=SUM([.V10:.V16])" office:value-type="float" office:value="-145171.57534072" calcext:value-type="float">
            <text:p><text:s/>(145,171.58)</text:p>
          </table:table-cell>
          <table:table-cell table:style-name="ce520" table:formula="of:=SUM([.W10:.W16])" office:value-type="float" office:value="-145406.896285538" calcext:value-type="float">
            <text:p><text:s/>(145,406.90)</text:p>
          </table:table-cell>
          <table:table-cell table:style-name="ce520" table:formula="of:=SUM([.X10:.X16])" office:value-type="float" office:value="-166514.28480915" calcext:value-type="float">
            <text:p><text:s/>(166,514.28)</text:p>
          </table:table-cell>
          <table:table-cell table:number-columns-repeated="2"/>
          <table:table-cell table:style-name="ce645" office:value-type="string" calcext:value-type="string">
            <text:p>II. EGRESOS</text:p>
          </table:table-cell>
          <table:table-cell table:style-name="ce731" table:formula="of:=-SUM([.AB10:.AB12])" office:value-type="float" office:value="0" calcext:value-type="float">
            <text:p><text:s/>- <text:s text:c="2"/></text:p>
          </table:table-cell>
          <table:table-cell table:style-name="ce520" table:formula="of:=SUM([.AC10:.AC16])" office:value-type="float" office:value="-50505.1887849319" calcext:value-type="float">
            <text:p><text:s/>(50,505.19)</text:p>
          </table:table-cell>
          <table:table-cell table:style-name="ce520" table:formula="of:=SUM([.AD10:.AD16])" office:value-type="float" office:value="-144975.474553373" calcext:value-type="float">
            <text:p><text:s/>(144,975.47)</text:p>
          </table:table-cell>
          <table:table-cell table:style-name="ce520" table:formula="of:=SUM([.AE10:.AE16])" office:value-type="float" office:value="-145171.57534072" calcext:value-type="float">
            <text:p><text:s/>(145,171.58)</text:p>
          </table:table-cell>
          <table:table-cell table:style-name="ce520" table:formula="of:=SUM([.AF10:.AF16])" office:value-type="float" office:value="-145406.896285538" calcext:value-type="float">
            <text:p><text:s/>(145,406.90)</text:p>
          </table:table-cell>
          <table:table-cell table:style-name="ce520" table:formula="of:=SUM([.AG10:.AG16])" office:value-type="float" office:value="-166514.28480915" calcext:value-type="float">
            <text:p><text:s/>(166,514.28)</text:p>
          </table:table-cell>
          <table:table-cell table:number-columns-repeated="2"/>
          <table:table-cell table:style-name="ce645" office:value-type="string" calcext:value-type="string">
            <text:p>II. EGRESOS</text:p>
          </table:table-cell>
          <table:table-cell table:style-name="ce731" table:formula="of:=-SUM([.AK10:.AK12])" office:value-type="float" office:value="0" calcext:value-type="float">
            <text:p><text:s/>- <text:s text:c="2"/></text:p>
          </table:table-cell>
          <table:table-cell table:style-name="ce520" table:formula="of:=SUM([.AL10:.AL16])" office:value-type="float" office:value="-50505.1887849319" calcext:value-type="float">
            <text:p><text:s/>(50,505.19)</text:p>
          </table:table-cell>
          <table:table-cell table:style-name="ce520" table:formula="of:=SUM([.AM10:.AM16])" office:value-type="float" office:value="-144975.474553373" calcext:value-type="float">
            <text:p><text:s/>(144,975.47)</text:p>
          </table:table-cell>
          <table:table-cell table:style-name="ce520" table:formula="of:=SUM([.AN10:.AN16])" office:value-type="float" office:value="-145171.57534072" calcext:value-type="float">
            <text:p><text:s/>(145,171.58)</text:p>
          </table:table-cell>
          <table:table-cell table:style-name="ce520" table:formula="of:=SUM([.AO10:.AO16])" office:value-type="float" office:value="-145406.896285538" calcext:value-type="float">
            <text:p><text:s/>(145,406.90)</text:p>
          </table:table-cell>
          <table:table-cell table:style-name="ce520" table:formula="of:=SUM([.AP10:.AP16])" office:value-type="float" office:value="-166514.28480915" calcext:value-type="float">
            <text:p><text:s/>(166,514.28)</text:p>
          </table:table-cell>
          <table:table-cell table:number-columns-repeated="2"/>
          <table:table-cell table:style-name="ce645" office:value-type="string" calcext:value-type="string">
            <text:p>II. EGRESOS</text:p>
          </table:table-cell>
          <table:table-cell table:style-name="ce731" table:formula="of:=-SUM([.AT10:.AT12])" office:value-type="float" office:value="0" calcext:value-type="float">
            <text:p><text:s/>- <text:s text:c="2"/></text:p>
          </table:table-cell>
          <table:table-cell table:style-name="ce520" table:formula="of:=SUM([.AU10:.AU16])" office:value-type="float" office:value="-50505.1887849319" calcext:value-type="float">
            <text:p><text:s/>(50,505.19)</text:p>
          </table:table-cell>
          <table:table-cell table:style-name="ce520" table:formula="of:=SUM([.AV10:.AV16])" office:value-type="float" office:value="-144975.474553373" calcext:value-type="float">
            <text:p><text:s/>(144,975.47)</text:p>
          </table:table-cell>
          <table:table-cell table:style-name="ce520" table:formula="of:=SUM([.AW10:.AW16])" office:value-type="float" office:value="-145171.57534072" calcext:value-type="float">
            <text:p><text:s/>(145,171.58)</text:p>
          </table:table-cell>
          <table:table-cell table:style-name="ce520" table:formula="of:=SUM([.AX10:.AX16])" office:value-type="float" office:value="-145406.896285538" calcext:value-type="float">
            <text:p><text:s/>(145,406.90)</text:p>
          </table:table-cell>
          <table:table-cell table:style-name="ce520" table:formula="of:=SUM([.AY10:.AY16])" office:value-type="float" office:value="-166514.28480915" calcext:value-type="float">
            <text:p><text:s/>(166,514.28)</text:p>
          </table:table-cell>
          <table:table-cell table:number-columns-repeated="2"/>
          <table:table-cell table:style-name="ce645" office:value-type="string" calcext:value-type="string">
            <text:p>II. EGRESOS</text:p>
          </table:table-cell>
          <table:table-cell table:style-name="ce731" table:formula="of:=-SUM([.BC10:.BC12])" office:value-type="float" office:value="0" calcext:value-type="float">
            <text:p><text:s/>- <text:s text:c="2"/></text:p>
          </table:table-cell>
          <table:table-cell table:style-name="ce520" table:formula="of:=SUM([.BD10:.BD16])" office:value-type="float" office:value="-50505.1887849319" calcext:value-type="float">
            <text:p><text:s/>(50,505.19)</text:p>
          </table:table-cell>
          <table:table-cell table:style-name="ce520" table:formula="of:=SUM([.BE10:.BE16])" office:value-type="float" office:value="-144975.474553373" calcext:value-type="float">
            <text:p><text:s/>(144,975.47)</text:p>
          </table:table-cell>
          <table:table-cell table:style-name="ce520" table:formula="of:=SUM([.BF10:.BF16])" office:value-type="float" office:value="-145171.57534072" calcext:value-type="float">
            <text:p><text:s/>(145,171.58)</text:p>
          </table:table-cell>
          <table:table-cell table:style-name="ce520" table:formula="of:=SUM([.BG10:.BG16])" office:value-type="float" office:value="-145406.896285538" calcext:value-type="float">
            <text:p><text:s/>(145,406.90)</text:p>
          </table:table-cell>
          <table:table-cell table:style-name="ce520" table:formula="of:=SUM([.BH10:.BH16])" office:value-type="float" office:value="-166514.28480915" calcext:value-type="float">
            <text:p><text:s/>(166,514.28)</text:p>
          </table:table-cell>
          <table:table-cell table:number-columns-repeated="2"/>
          <table:table-cell table:style-name="ce645" office:value-type="string" calcext:value-type="string">
            <text:p>II. EGRESOS</text:p>
          </table:table-cell>
          <table:table-cell table:style-name="ce731" table:formula="of:=-SUM([.BL10:.BL12])" office:value-type="float" office:value="0" calcext:value-type="float">
            <text:p><text:s/>- <text:s text:c="2"/></text:p>
          </table:table-cell>
          <table:table-cell table:style-name="ce520" table:formula="of:=SUM([.BM10:.BM16])" office:value-type="float" office:value="-50505.1887849319" calcext:value-type="float">
            <text:p><text:s/>(50,505.19)</text:p>
          </table:table-cell>
          <table:table-cell table:style-name="ce520" table:formula="of:=SUM([.BN10:.BN16])" office:value-type="float" office:value="-144975.474553373" calcext:value-type="float">
            <text:p><text:s/>(144,975.47)</text:p>
          </table:table-cell>
          <table:table-cell table:style-name="ce520" table:formula="of:=SUM([.BO10:.BO16])" office:value-type="float" office:value="-145171.57534072" calcext:value-type="float">
            <text:p><text:s/>(145,171.58)</text:p>
          </table:table-cell>
          <table:table-cell table:style-name="ce520" table:formula="of:=SUM([.BP10:.BP16])" office:value-type="float" office:value="-145406.896285538" calcext:value-type="float">
            <text:p><text:s/>(145,406.90)</text:p>
          </table:table-cell>
          <table:table-cell table:style-name="ce520" table:formula="of:=SUM([.BQ10:.BQ16])" office:value-type="float" office:value="-166514.28480915" calcext:value-type="float">
            <text:p><text:s/>(166,514.28)</text:p>
          </table:table-cell>
          <table:table-cell table:number-columns-repeated="2"/>
          <table:table-cell table:style-name="ce645" office:value-type="string" calcext:value-type="string">
            <text:p>II. EGRESOS</text:p>
          </table:table-cell>
          <table:table-cell table:style-name="ce731" table:formula="of:=-SUM([.BU10:.BU12])" office:value-type="float" office:value="0" calcext:value-type="float">
            <text:p><text:s/>- <text:s text:c="2"/></text:p>
          </table:table-cell>
          <table:table-cell table:style-name="ce520" table:formula="of:=SUM([.BV10:.BV16])" office:value-type="float" office:value="-50505.1887849319" calcext:value-type="float">
            <text:p><text:s/>(50,505.19)</text:p>
          </table:table-cell>
          <table:table-cell table:style-name="ce520" table:formula="of:=SUM([.BW10:.BW16])" office:value-type="float" office:value="-144975.474553373" calcext:value-type="float">
            <text:p><text:s/>(144,975.47)</text:p>
          </table:table-cell>
          <table:table-cell table:style-name="ce520" table:formula="of:=SUM([.BX10:.BX16])" office:value-type="float" office:value="-145171.57534072" calcext:value-type="float">
            <text:p><text:s/>(145,171.58)</text:p>
          </table:table-cell>
          <table:table-cell table:style-name="ce520" table:formula="of:=SUM([.BY10:.BY16])" office:value-type="float" office:value="-145406.896285538" calcext:value-type="float">
            <text:p><text:s/>(145,406.90)</text:p>
          </table:table-cell>
          <table:table-cell table:style-name="ce520" table:formula="of:=SUM([.BZ10:.BZ16])" office:value-type="float" office:value="-166514.28480915" calcext:value-type="float">
            <text:p><text:s/>(166,514.28)</text:p>
          </table:table-cell>
          <table:table-cell table:number-columns-repeated="16306"/>
        </table:table-row>
        <table:table-row table:style-name="ro1">
          <table:table-cell table:style-name="ce781" office:value-type="float" office:value="5" calcext:value-type="float">
            <text:p>5</text:p>
          </table:table-cell>
          <table:table-cell table:style-name="ce789" table:formula="of:=[$'FLUJO DE CAJA '.G23]" office:value-type="float" office:value="188559.476254946" calcext:value-type="float">
            <text:p><text:s/>188,559.48 </text:p>
          </table:table-cell>
          <table:table-cell table:style-name="ce792" table:formula="of:=1/(1+[.$B$1])^[.A10]" office:value-type="float" office:value="0.407422613051154" calcext:value-type="float">
            <text:p><text:s/>0.41 </text:p>
          </table:table-cell>
          <table:table-cell table:style-name="ce789" table:formula="of:=[.B10]*[.C10]" office:value-type="float" office:value="76823.394531347" calcext:value-type="float">
            <text:p><text:s/>76,823.39 </text:p>
          </table:table-cell>
          <table:table-cell table:style-name="ce783" table:number-columns-repeated="2"/>
          <table:table-cell table:style-name="ce781" office:value-type="float" office:value="5" calcext:value-type="float">
            <text:p>5</text:p>
          </table:table-cell>
          <table:table-cell table:style-name="ce789" table:formula="of:=[$'FLUJO DE CAJA '.G27]" office:value-type="float" office:value="188559.476254946" calcext:value-type="float">
            <text:p><text:s/>188,559.48 </text:p>
          </table:table-cell>
          <table:table-cell table:style-name="ce812" table:formula="of:=1/(1+[.$H$1])^[.G10]" office:value-type="float" office:value="0.401877572016461" calcext:value-type="float">
            <text:p><text:s/>0.40 </text:p>
          </table:table-cell>
          <table:table-cell table:style-name="ce789" table:formula="of:=[.H10]*[.I10]" office:value-type="float" office:value="75777.8244980331" calcext:value-type="float">
            <text:p><text:s/>75,777.82 </text:p>
          </table:table-cell>
          <table:table-cell table:style-name="ce783" table:number-columns-repeated="2"/>
          <table:table-cell table:style-name="ce224" table:formula="of:=+[$'PLAN DE PRODUCCION'.B26]" office:value-type="float" office:value="2025" calcext:value-type="float">
            <text:p>2025</text:p>
          </table:table-cell>
          <table:table-cell table:style-name="ce818" table:formula="of:=+[$'PLAN DE PRODUCCION'.C26]*[.$N$3]" office:value-type="float" office:value="11443.696" calcext:value-type="float">
            <text:p>11443.70</text:p>
          </table:table-cell>
          <table:table-cell table:style-name="ce818" table:formula="of:=+[$'PLAN DE PRODUCCION'.D26]*[.$O$3]" office:value-type="float" office:value="18" calcext:value-type="float">
            <text:p>18.00</text:p>
          </table:table-cell>
          <table:table-cell table:style-name="ce818" table:formula="of:=[.N10]*[.O10]" office:value-type="float" office:value="205986.528" calcext:value-type="float">
            <text:p>205986.53</text:p>
          </table:table-cell>
          <table:table-cell/>
          <table:table-cell table:style-name="ce656" office:value-type="string" calcext:value-type="string">
            <text:p>II.1. COSTOS DE PRODUCCIÒN</text:p>
          </table:table-cell>
          <table:table-cell table:style-name="ce732"/>
          <table:table-cell table:style-name="ce521" table:formula="of:=+[$'FLUJO DE CAJA '.C14]" office:value-type="float" office:value="-45407.0823105033" calcext:value-type="float">
            <text:p><text:s/>(45,407.08)</text:p>
          </table:table-cell>
          <table:table-cell table:style-name="ce521" table:formula="of:=+[$'FLUJO DE CAJA '.D14]" office:value-type="float" office:value="-116426.673626667" calcext:value-type="float">
            <text:p><text:s/>(116,426.67)</text:p>
          </table:table-cell>
          <table:table-cell table:style-name="ce521" table:formula="of:=+[$'FLUJO DE CAJA '.E14]" office:value-type="float" office:value="-116426.673626667" calcext:value-type="float">
            <text:p><text:s/>(116,426.67)</text:p>
          </table:table-cell>
          <table:table-cell table:style-name="ce521" table:formula="of:=+[$'FLUJO DE CAJA '.F14]" office:value-type="float" office:value="-116426.673626667" calcext:value-type="float">
            <text:p><text:s/>(116,426.67)</text:p>
          </table:table-cell>
          <table:table-cell table:style-name="ce521" table:formula="of:=+[$'FLUJO DE CAJA '.G14]" office:value-type="float" office:value="-116426.673626667" calcext:value-type="float">
            <text:p><text:s/>(116,426.67)</text:p>
          </table:table-cell>
          <table:table-cell table:number-columns-repeated="2"/>
          <table:table-cell table:style-name="ce656" office:value-type="string" calcext:value-type="string">
            <text:p>II.1. COSTOS DE PRODUCCIÒN</text:p>
          </table:table-cell>
          <table:table-cell table:style-name="ce732"/>
          <table:table-cell table:style-name="ce521" table:formula="of:=+[.T10]" office:value-type="float" office:value="-45407.0823105033" calcext:value-type="float">
            <text:p><text:s/>(45,407.08)</text:p>
          </table:table-cell>
          <table:table-cell table:style-name="ce521" table:formula="of:=+[.U10]" office:value-type="float" office:value="-116426.673626667" calcext:value-type="float">
            <text:p><text:s/>(116,426.67)</text:p>
          </table:table-cell>
          <table:table-cell table:style-name="ce521" table:formula="of:=+[.V10]" office:value-type="float" office:value="-116426.673626667" calcext:value-type="float">
            <text:p><text:s/>(116,426.67)</text:p>
          </table:table-cell>
          <table:table-cell table:style-name="ce521" table:formula="of:=+[.W10]" office:value-type="float" office:value="-116426.673626667" calcext:value-type="float">
            <text:p><text:s/>(116,426.67)</text:p>
          </table:table-cell>
          <table:table-cell table:style-name="ce521" table:formula="of:=+[.X10]" office:value-type="float" office:value="-116426.673626667" calcext:value-type="float">
            <text:p><text:s/>(116,426.67)</text:p>
          </table:table-cell>
          <table:table-cell table:number-columns-repeated="2"/>
          <table:table-cell table:style-name="ce656" office:value-type="string" calcext:value-type="string">
            <text:p>II.1. COSTOS DE PRODUCCIÒN</text:p>
          </table:table-cell>
          <table:table-cell table:style-name="ce732"/>
          <table:table-cell table:style-name="ce521" table:formula="of:=+[.AC10]" office:value-type="float" office:value="-45407.0823105033" calcext:value-type="float">
            <text:p><text:s/>(45,407.08)</text:p>
          </table:table-cell>
          <table:table-cell table:style-name="ce521" table:formula="of:=+[.AD10]" office:value-type="float" office:value="-116426.673626667" calcext:value-type="float">
            <text:p><text:s/>(116,426.67)</text:p>
          </table:table-cell>
          <table:table-cell table:style-name="ce521" table:formula="of:=+[.AE10]" office:value-type="float" office:value="-116426.673626667" calcext:value-type="float">
            <text:p><text:s/>(116,426.67)</text:p>
          </table:table-cell>
          <table:table-cell table:style-name="ce521" table:formula="of:=+[.AF10]" office:value-type="float" office:value="-116426.673626667" calcext:value-type="float">
            <text:p><text:s/>(116,426.67)</text:p>
          </table:table-cell>
          <table:table-cell table:style-name="ce521" table:formula="of:=+[.AG10]" office:value-type="float" office:value="-116426.673626667" calcext:value-type="float">
            <text:p><text:s/>(116,426.67)</text:p>
          </table:table-cell>
          <table:table-cell table:number-columns-repeated="2"/>
          <table:table-cell table:style-name="ce656" office:value-type="string" calcext:value-type="string">
            <text:p>II.1. COSTOS DE PRODUCCIÒN</text:p>
          </table:table-cell>
          <table:table-cell table:style-name="ce732"/>
          <table:table-cell table:style-name="ce521" table:formula="of:=+[.AL10]" office:value-type="float" office:value="-45407.0823105033" calcext:value-type="float">
            <text:p><text:s/>(45,407.08)</text:p>
          </table:table-cell>
          <table:table-cell table:style-name="ce521" table:formula="of:=+[.AM10]" office:value-type="float" office:value="-116426.673626667" calcext:value-type="float">
            <text:p><text:s/>(116,426.67)</text:p>
          </table:table-cell>
          <table:table-cell table:style-name="ce521" table:formula="of:=+[.AN10]" office:value-type="float" office:value="-116426.673626667" calcext:value-type="float">
            <text:p><text:s/>(116,426.67)</text:p>
          </table:table-cell>
          <table:table-cell table:style-name="ce521" table:formula="of:=+[.AO10]" office:value-type="float" office:value="-116426.673626667" calcext:value-type="float">
            <text:p><text:s/>(116,426.67)</text:p>
          </table:table-cell>
          <table:table-cell table:style-name="ce521" table:formula="of:=+[.AP10]" office:value-type="float" office:value="-116426.673626667" calcext:value-type="float">
            <text:p><text:s/>(116,426.67)</text:p>
          </table:table-cell>
          <table:table-cell table:number-columns-repeated="2"/>
          <table:table-cell table:style-name="ce656" office:value-type="string" calcext:value-type="string">
            <text:p>II.1. COSTOS DE PRODUCCIÒN</text:p>
          </table:table-cell>
          <table:table-cell table:style-name="ce732"/>
          <table:table-cell table:style-name="ce521" table:formula="of:=+[.AU10]" office:value-type="float" office:value="-45407.0823105033" calcext:value-type="float">
            <text:p><text:s/>(45,407.08)</text:p>
          </table:table-cell>
          <table:table-cell table:style-name="ce521" table:formula="of:=+[.AV10]" office:value-type="float" office:value="-116426.673626667" calcext:value-type="float">
            <text:p><text:s/>(116,426.67)</text:p>
          </table:table-cell>
          <table:table-cell table:style-name="ce521" table:formula="of:=+[.AW10]" office:value-type="float" office:value="-116426.673626667" calcext:value-type="float">
            <text:p><text:s/>(116,426.67)</text:p>
          </table:table-cell>
          <table:table-cell table:style-name="ce521" table:formula="of:=+[.AX10]" office:value-type="float" office:value="-116426.673626667" calcext:value-type="float">
            <text:p><text:s/>(116,426.67)</text:p>
          </table:table-cell>
          <table:table-cell table:style-name="ce521" table:formula="of:=+[.AY10]" office:value-type="float" office:value="-116426.673626667" calcext:value-type="float">
            <text:p><text:s/>(116,426.67)</text:p>
          </table:table-cell>
          <table:table-cell table:number-columns-repeated="2"/>
          <table:table-cell table:style-name="ce656" office:value-type="string" calcext:value-type="string">
            <text:p>II.1. COSTOS DE PRODUCCIÒN</text:p>
          </table:table-cell>
          <table:table-cell table:style-name="ce732"/>
          <table:table-cell table:style-name="ce521" table:formula="of:=+[.BD10]" office:value-type="float" office:value="-45407.0823105033" calcext:value-type="float">
            <text:p><text:s/>(45,407.08)</text:p>
          </table:table-cell>
          <table:table-cell table:style-name="ce521" table:formula="of:=+[.BE10]" office:value-type="float" office:value="-116426.673626667" calcext:value-type="float">
            <text:p><text:s/>(116,426.67)</text:p>
          </table:table-cell>
          <table:table-cell table:style-name="ce521" table:formula="of:=+[.BF10]" office:value-type="float" office:value="-116426.673626667" calcext:value-type="float">
            <text:p><text:s/>(116,426.67)</text:p>
          </table:table-cell>
          <table:table-cell table:style-name="ce521" table:formula="of:=+[.BG10]" office:value-type="float" office:value="-116426.673626667" calcext:value-type="float">
            <text:p><text:s/>(116,426.67)</text:p>
          </table:table-cell>
          <table:table-cell table:style-name="ce521" table:formula="of:=+[.BH10]" office:value-type="float" office:value="-116426.673626667" calcext:value-type="float">
            <text:p><text:s/>(116,426.67)</text:p>
          </table:table-cell>
          <table:table-cell table:number-columns-repeated="2"/>
          <table:table-cell table:style-name="ce656" office:value-type="string" calcext:value-type="string">
            <text:p>II.1. COSTOS DE PRODUCCIÒN</text:p>
          </table:table-cell>
          <table:table-cell table:style-name="ce732"/>
          <table:table-cell table:style-name="ce521" table:formula="of:=+[.BM10]" office:value-type="float" office:value="-45407.0823105033" calcext:value-type="float">
            <text:p><text:s/>(45,407.08)</text:p>
          </table:table-cell>
          <table:table-cell table:style-name="ce521" table:formula="of:=+[.BN10]" office:value-type="float" office:value="-116426.673626667" calcext:value-type="float">
            <text:p><text:s/>(116,426.67)</text:p>
          </table:table-cell>
          <table:table-cell table:style-name="ce521" table:formula="of:=+[.BO10]" office:value-type="float" office:value="-116426.673626667" calcext:value-type="float">
            <text:p><text:s/>(116,426.67)</text:p>
          </table:table-cell>
          <table:table-cell table:style-name="ce521" table:formula="of:=+[.BP10]" office:value-type="float" office:value="-116426.673626667" calcext:value-type="float">
            <text:p><text:s/>(116,426.67)</text:p>
          </table:table-cell>
          <table:table-cell table:style-name="ce521" table:formula="of:=+[.BQ10]" office:value-type="float" office:value="-116426.673626667" calcext:value-type="float">
            <text:p><text:s/>(116,426.67)</text:p>
          </table:table-cell>
          <table:table-cell table:number-columns-repeated="16306"/>
        </table:table-row>
        <table:table-row table:style-name="ro22">
          <table:table-cell table:style-name="ce782" office:value-type="string" calcext:value-type="string" table:number-columns-spanned="3" table:number-rows-spanned="1">
            <text:p>VANE</text:p>
          </table:table-cell>
          <table:covered-table-cell table:style-name="ce790"/>
          <table:covered-table-cell table:style-name="ce793"/>
          <table:table-cell table:style-name="ce794" table:formula="of:=SUM([.D5:.D10])" office:value-type="float" office:value="50101.1915976451" calcext:value-type="float">
            <text:p><text:s/>50,101.19 </text:p>
          </table:table-cell>
          <table:table-cell table:style-name="ce783" table:number-columns-repeated="2"/>
          <table:table-cell table:style-name="ce782" office:value-type="string" calcext:value-type="string" table:number-columns-spanned="3" table:number-rows-spanned="1">
            <text:p>VANE</text:p>
          </table:table-cell>
          <table:covered-table-cell table:style-name="ce790"/>
          <table:covered-table-cell table:style-name="ce793"/>
          <table:table-cell table:style-name="ce794" table:formula="of:=SUM([.J5:.J10])" office:value-type="float" office:value="48801.0052348695" calcext:value-type="float">
            <text:p><text:s/>48,801.01 </text:p>
          </table:table-cell>
          <table:table-cell table:style-name="ce783" table:number-columns-repeated="2"/>
          <table:table-cell table:number-columns-repeated="5"/>
          <table:table-cell table:style-name="ce656" office:value-type="string" calcext:value-type="string">
            <text:p>II.2. GASTOS DE OPERACIÒN</text:p>
          </table:table-cell>
          <table:table-cell table:style-name="ce732"/>
          <table:table-cell table:style-name="ce521" table:formula="of:=+[$'FLUJO DE CAJA '.C15]" office:value-type="float" office:value="-4987" calcext:value-type="float">
            <text:p><text:s/>(4,987.00)</text:p>
          </table:table-cell>
          <table:table-cell table:style-name="ce521" table:formula="of:=+[$'FLUJO DE CAJA '.D15]" office:value-type="float" office:value="-4987" calcext:value-type="float">
            <text:p><text:s/>(4,987.00)</text:p>
          </table:table-cell>
          <table:table-cell table:style-name="ce521" table:formula="of:=+[$'FLUJO DE CAJA '.E15]" office:value-type="float" office:value="-4987" calcext:value-type="float">
            <text:p><text:s/>(4,987.00)</text:p>
          </table:table-cell>
          <table:table-cell table:style-name="ce521" table:formula="of:=+[$'FLUJO DE CAJA '.F15]" office:value-type="float" office:value="-4987" calcext:value-type="float">
            <text:p><text:s/>(4,987.00)</text:p>
          </table:table-cell>
          <table:table-cell table:style-name="ce521" table:formula="of:=+[$'FLUJO DE CAJA '.G15]" office:value-type="float" office:value="-4987" calcext:value-type="float">
            <text:p><text:s/>(4,987.00)</text:p>
          </table:table-cell>
          <table:table-cell table:number-columns-repeated="2"/>
          <table:table-cell table:style-name="ce656" office:value-type="string" calcext:value-type="string">
            <text:p>II.2. GASTOS DE OPERACIÒN</text:p>
          </table:table-cell>
          <table:table-cell table:style-name="ce732"/>
          <table:table-cell table:style-name="ce521" table:formula="of:=+[.T11]" office:value-type="float" office:value="-4987" calcext:value-type="float">
            <text:p><text:s/>(4,987.00)</text:p>
          </table:table-cell>
          <table:table-cell table:style-name="ce521" table:formula="of:=+[.U11]" office:value-type="float" office:value="-4987" calcext:value-type="float">
            <text:p><text:s/>(4,987.00)</text:p>
          </table:table-cell>
          <table:table-cell table:style-name="ce521" table:formula="of:=+[.V11]" office:value-type="float" office:value="-4987" calcext:value-type="float">
            <text:p><text:s/>(4,987.00)</text:p>
          </table:table-cell>
          <table:table-cell table:style-name="ce521" table:formula="of:=+[.W11]" office:value-type="float" office:value="-4987" calcext:value-type="float">
            <text:p><text:s/>(4,987.00)</text:p>
          </table:table-cell>
          <table:table-cell table:style-name="ce521" table:formula="of:=+[.X11]" office:value-type="float" office:value="-4987" calcext:value-type="float">
            <text:p><text:s/>(4,987.00)</text:p>
          </table:table-cell>
          <table:table-cell table:number-columns-repeated="2"/>
          <table:table-cell table:style-name="ce656" office:value-type="string" calcext:value-type="string">
            <text:p>II.2. GASTOS DE OPERACIÒN</text:p>
          </table:table-cell>
          <table:table-cell table:style-name="ce732"/>
          <table:table-cell table:style-name="ce521" table:formula="of:=+[.AC11]" office:value-type="float" office:value="-4987" calcext:value-type="float">
            <text:p><text:s/>(4,987.00)</text:p>
          </table:table-cell>
          <table:table-cell table:style-name="ce521" table:formula="of:=+[.AD11]" office:value-type="float" office:value="-4987" calcext:value-type="float">
            <text:p><text:s/>(4,987.00)</text:p>
          </table:table-cell>
          <table:table-cell table:style-name="ce521" table:formula="of:=+[.AE11]" office:value-type="float" office:value="-4987" calcext:value-type="float">
            <text:p><text:s/>(4,987.00)</text:p>
          </table:table-cell>
          <table:table-cell table:style-name="ce521" table:formula="of:=+[.AF11]" office:value-type="float" office:value="-4987" calcext:value-type="float">
            <text:p><text:s/>(4,987.00)</text:p>
          </table:table-cell>
          <table:table-cell table:style-name="ce521" table:formula="of:=+[.AG11]" office:value-type="float" office:value="-4987" calcext:value-type="float">
            <text:p><text:s/>(4,987.00)</text:p>
          </table:table-cell>
          <table:table-cell table:number-columns-repeated="2"/>
          <table:table-cell table:style-name="ce656" office:value-type="string" calcext:value-type="string">
            <text:p>II.2. GASTOS DE OPERACIÒN</text:p>
          </table:table-cell>
          <table:table-cell table:style-name="ce732"/>
          <table:table-cell table:style-name="ce521" table:formula="of:=+[.AL11]" office:value-type="float" office:value="-4987" calcext:value-type="float">
            <text:p><text:s/>(4,987.00)</text:p>
          </table:table-cell>
          <table:table-cell table:style-name="ce521" table:formula="of:=+[.AM11]" office:value-type="float" office:value="-4987" calcext:value-type="float">
            <text:p><text:s/>(4,987.00)</text:p>
          </table:table-cell>
          <table:table-cell table:style-name="ce521" table:formula="of:=+[.AN11]" office:value-type="float" office:value="-4987" calcext:value-type="float">
            <text:p><text:s/>(4,987.00)</text:p>
          </table:table-cell>
          <table:table-cell table:style-name="ce521" table:formula="of:=+[.AO11]" office:value-type="float" office:value="-4987" calcext:value-type="float">
            <text:p><text:s/>(4,987.00)</text:p>
          </table:table-cell>
          <table:table-cell table:style-name="ce521" table:formula="of:=+[.AP11]" office:value-type="float" office:value="-4987" calcext:value-type="float">
            <text:p><text:s/>(4,987.00)</text:p>
          </table:table-cell>
          <table:table-cell table:number-columns-repeated="2"/>
          <table:table-cell table:style-name="ce656" office:value-type="string" calcext:value-type="string">
            <text:p>II.2. GASTOS DE OPERACIÒN</text:p>
          </table:table-cell>
          <table:table-cell table:style-name="ce732"/>
          <table:table-cell table:style-name="ce521" table:formula="of:=+[.AU11]" office:value-type="float" office:value="-4987" calcext:value-type="float">
            <text:p><text:s/>(4,987.00)</text:p>
          </table:table-cell>
          <table:table-cell table:style-name="ce521" table:formula="of:=+[.AV11]" office:value-type="float" office:value="-4987" calcext:value-type="float">
            <text:p><text:s/>(4,987.00)</text:p>
          </table:table-cell>
          <table:table-cell table:style-name="ce521" table:formula="of:=+[.AW11]" office:value-type="float" office:value="-4987" calcext:value-type="float">
            <text:p><text:s/>(4,987.00)</text:p>
          </table:table-cell>
          <table:table-cell table:style-name="ce521" table:formula="of:=+[.AX11]" office:value-type="float" office:value="-4987" calcext:value-type="float">
            <text:p><text:s/>(4,987.00)</text:p>
          </table:table-cell>
          <table:table-cell table:style-name="ce521" table:formula="of:=+[.AY11]" office:value-type="float" office:value="-4987" calcext:value-type="float">
            <text:p><text:s/>(4,987.00)</text:p>
          </table:table-cell>
          <table:table-cell table:number-columns-repeated="2"/>
          <table:table-cell table:style-name="ce656" office:value-type="string" calcext:value-type="string">
            <text:p>II.2. GASTOS DE OPERACIÒN</text:p>
          </table:table-cell>
          <table:table-cell table:style-name="ce732"/>
          <table:table-cell table:style-name="ce521" table:formula="of:=+[.BD11]" office:value-type="float" office:value="-4987" calcext:value-type="float">
            <text:p><text:s/>(4,987.00)</text:p>
          </table:table-cell>
          <table:table-cell table:style-name="ce521" table:formula="of:=+[.BE11]" office:value-type="float" office:value="-4987" calcext:value-type="float">
            <text:p><text:s/>(4,987.00)</text:p>
          </table:table-cell>
          <table:table-cell table:style-name="ce521" table:formula="of:=+[.BF11]" office:value-type="float" office:value="-4987" calcext:value-type="float">
            <text:p><text:s/>(4,987.00)</text:p>
          </table:table-cell>
          <table:table-cell table:style-name="ce521" table:formula="of:=+[.BG11]" office:value-type="float" office:value="-4987" calcext:value-type="float">
            <text:p><text:s/>(4,987.00)</text:p>
          </table:table-cell>
          <table:table-cell table:style-name="ce521" table:formula="of:=+[.BH11]" office:value-type="float" office:value="-4987" calcext:value-type="float">
            <text:p><text:s/>(4,987.00)</text:p>
          </table:table-cell>
          <table:table-cell table:number-columns-repeated="2"/>
          <table:table-cell table:style-name="ce656" office:value-type="string" calcext:value-type="string">
            <text:p>II.2. GASTOS DE OPERACIÒN</text:p>
          </table:table-cell>
          <table:table-cell table:style-name="ce732"/>
          <table:table-cell table:style-name="ce521" table:formula="of:=+[.BM11]" office:value-type="float" office:value="-4987" calcext:value-type="float">
            <text:p><text:s/>(4,987.00)</text:p>
          </table:table-cell>
          <table:table-cell table:style-name="ce521" table:formula="of:=+[.BN11]" office:value-type="float" office:value="-4987" calcext:value-type="float">
            <text:p><text:s/>(4,987.00)</text:p>
          </table:table-cell>
          <table:table-cell table:style-name="ce521" table:formula="of:=+[.BO11]" office:value-type="float" office:value="-4987" calcext:value-type="float">
            <text:p><text:s/>(4,987.00)</text:p>
          </table:table-cell>
          <table:table-cell table:style-name="ce521" table:formula="of:=+[.BP11]" office:value-type="float" office:value="-4987" calcext:value-type="float">
            <text:p><text:s/>(4,987.00)</text:p>
          </table:table-cell>
          <table:table-cell table:style-name="ce521" table:formula="of:=+[.BQ11]" office:value-type="float" office:value="-4987" calcext:value-type="float">
            <text:p><text:s/>(4,987.00)</text:p>
          </table:table-cell>
          <table:table-cell table:number-columns-repeated="16306"/>
        </table:table-row>
        <table:table-row table:style-name="ro46">
          <table:table-cell table:style-name="ce782" office:value-type="string" calcext:value-type="string" table:number-columns-spanned="3" table:number-rows-spanned="1">
            <text:p>TIRE</text:p>
          </table:table-cell>
          <table:covered-table-cell table:style-name="ce790"/>
          <table:covered-table-cell table:style-name="ce793"/>
          <table:table-cell table:style-name="ce795" table:formula="of:=IRR([.B5:.B10];[.B1])" office:value-type="percentage" office:value="0.302559974713295" calcext:value-type="percentage">
            <text:p>30.26 %</text:p>
          </table:table-cell>
          <table:table-cell table:style-name="ce783" table:number-columns-repeated="2"/>
          <table:table-cell table:style-name="ce782" office:value-type="string" calcext:value-type="string" table:number-columns-spanned="3" table:number-rows-spanned="1">
            <text:p>TIRE</text:p>
          </table:table-cell>
          <table:covered-table-cell table:style-name="ce790"/>
          <table:covered-table-cell table:style-name="ce793"/>
          <table:table-cell table:style-name="ce795" table:formula="of:=IRR([.H5:.H10];[.H1])" office:value-type="percentage" office:value="0.305097575868706" calcext:value-type="percentage">
            <text:p>30.51 %</text:p>
          </table:table-cell>
          <table:table-cell table:style-name="ce783" table:number-columns-repeated="2"/>
          <table:table-cell table:number-columns-repeated="5"/>
          <table:table-cell table:style-name="ce723" office:value-type="string" calcext:value-type="string">
            <text:p>II.3. IMPUESTO A LA RENTA</text:p>
          </table:table-cell>
          <table:table-cell table:style-name="ce733"/>
          <table:table-cell table:style-name="ce521" table:formula="of:=+[$'FLUJO DE CAJA '.C16]" office:value-type="float" office:value="705.980139521147" calcext:value-type="float">
            <text:p><text:s/>705.98 </text:p>
          </table:table-cell>
          <table:table-cell table:style-name="ce521" table:formula="of:=+[$'FLUJO DE CAJA '.D16]" office:value-type="float" office:value="-22581.2969899661" calcext:value-type="float">
            <text:p><text:s/>(22,581.30)</text:p>
          </table:table-cell>
          <table:table-cell table:style-name="ce521" table:formula="of:=+[$'FLUJO DE CAJA '.E16]" office:value-type="float" office:value="-22581.2969899661" calcext:value-type="float">
            <text:p><text:s/>(22,581.30)</text:p>
          </table:table-cell>
          <table:table-cell table:style-name="ce521" table:formula="of:=+[$'FLUJO DE CAJA '.F16]" office:value-type="float" office:value="-22581.2969899661" calcext:value-type="float">
            <text:p><text:s/>(22,581.30)</text:p>
          </table:table-cell>
          <table:table-cell table:style-name="ce521" table:formula="of:=+[$'FLUJO DE CAJA '.G16]" office:value-type="float" office:value="-43406.3003797966" calcext:value-type="float">
            <text:p><text:s/>(43,406.30)</text:p>
          </table:table-cell>
          <table:table-cell table:number-columns-repeated="2"/>
          <table:table-cell table:style-name="ce723" office:value-type="string" calcext:value-type="string">
            <text:p>II.3. IMPUESTO A LA RENTA</text:p>
          </table:table-cell>
          <table:table-cell table:style-name="ce733"/>
          <table:table-cell table:style-name="ce521" table:formula="of:=+[.T12]" office:value-type="float" office:value="705.980139521147" calcext:value-type="float">
            <text:p><text:s/>705.98 </text:p>
          </table:table-cell>
          <table:table-cell table:style-name="ce521" table:formula="of:=+[.U12]" office:value-type="float" office:value="-22581.2969899661" calcext:value-type="float">
            <text:p><text:s/>(22,581.30)</text:p>
          </table:table-cell>
          <table:table-cell table:style-name="ce521" table:formula="of:=+[.V12]" office:value-type="float" office:value="-22581.2969899661" calcext:value-type="float">
            <text:p><text:s/>(22,581.30)</text:p>
          </table:table-cell>
          <table:table-cell table:style-name="ce521" table:formula="of:=+[.W12]" office:value-type="float" office:value="-22581.2969899661" calcext:value-type="float">
            <text:p><text:s/>(22,581.30)</text:p>
          </table:table-cell>
          <table:table-cell table:style-name="ce521" table:formula="of:=+[.X12]" office:value-type="float" office:value="-43406.3003797966" calcext:value-type="float">
            <text:p><text:s/>(43,406.30)</text:p>
          </table:table-cell>
          <table:table-cell table:number-columns-repeated="2"/>
          <table:table-cell table:style-name="ce723" office:value-type="string" calcext:value-type="string">
            <text:p>II.3. IMPUESTO A LA RENTA</text:p>
          </table:table-cell>
          <table:table-cell table:style-name="ce733"/>
          <table:table-cell table:style-name="ce521" table:formula="of:=+[.AC12]" office:value-type="float" office:value="705.980139521147" calcext:value-type="float">
            <text:p><text:s/>705.98 </text:p>
          </table:table-cell>
          <table:table-cell table:style-name="ce521" table:formula="of:=+[.AD12]" office:value-type="float" office:value="-22581.2969899661" calcext:value-type="float">
            <text:p><text:s/>(22,581.30)</text:p>
          </table:table-cell>
          <table:table-cell table:style-name="ce521" table:formula="of:=+[.AE12]" office:value-type="float" office:value="-22581.2969899661" calcext:value-type="float">
            <text:p><text:s/>(22,581.30)</text:p>
          </table:table-cell>
          <table:table-cell table:style-name="ce521" table:formula="of:=+[.AF12]" office:value-type="float" office:value="-22581.2969899661" calcext:value-type="float">
            <text:p><text:s/>(22,581.30)</text:p>
          </table:table-cell>
          <table:table-cell table:style-name="ce521" table:formula="of:=+[.AG12]" office:value-type="float" office:value="-43406.3003797966" calcext:value-type="float">
            <text:p><text:s/>(43,406.30)</text:p>
          </table:table-cell>
          <table:table-cell table:number-columns-repeated="2"/>
          <table:table-cell table:style-name="ce723" office:value-type="string" calcext:value-type="string">
            <text:p>II.3. IMPUESTO A LA RENTA</text:p>
          </table:table-cell>
          <table:table-cell table:style-name="ce733"/>
          <table:table-cell table:style-name="ce521" table:formula="of:=+[.AL12]" office:value-type="float" office:value="705.980139521147" calcext:value-type="float">
            <text:p><text:s/>705.98 </text:p>
          </table:table-cell>
          <table:table-cell table:style-name="ce521" table:formula="of:=+[.AM12]" office:value-type="float" office:value="-22581.2969899661" calcext:value-type="float">
            <text:p><text:s/>(22,581.30)</text:p>
          </table:table-cell>
          <table:table-cell table:style-name="ce521" table:formula="of:=+[.AN12]" office:value-type="float" office:value="-22581.2969899661" calcext:value-type="float">
            <text:p><text:s/>(22,581.30)</text:p>
          </table:table-cell>
          <table:table-cell table:style-name="ce521" table:formula="of:=+[.AO12]" office:value-type="float" office:value="-22581.2969899661" calcext:value-type="float">
            <text:p><text:s/>(22,581.30)</text:p>
          </table:table-cell>
          <table:table-cell table:style-name="ce521" table:formula="of:=+[.AP12]" office:value-type="float" office:value="-43406.3003797966" calcext:value-type="float">
            <text:p><text:s/>(43,406.30)</text:p>
          </table:table-cell>
          <table:table-cell table:number-columns-repeated="2"/>
          <table:table-cell table:style-name="ce723" office:value-type="string" calcext:value-type="string">
            <text:p>II.3. IMPUESTO A LA RENTA</text:p>
          </table:table-cell>
          <table:table-cell table:style-name="ce733"/>
          <table:table-cell table:style-name="ce521" table:formula="of:=+[.AU12]" office:value-type="float" office:value="705.980139521147" calcext:value-type="float">
            <text:p><text:s/>705.98 </text:p>
          </table:table-cell>
          <table:table-cell table:style-name="ce521" table:formula="of:=+[.AV12]" office:value-type="float" office:value="-22581.2969899661" calcext:value-type="float">
            <text:p><text:s/>(22,581.30)</text:p>
          </table:table-cell>
          <table:table-cell table:style-name="ce521" table:formula="of:=+[.AW12]" office:value-type="float" office:value="-22581.2969899661" calcext:value-type="float">
            <text:p><text:s/>(22,581.30)</text:p>
          </table:table-cell>
          <table:table-cell table:style-name="ce521" table:formula="of:=+[.AX12]" office:value-type="float" office:value="-22581.2969899661" calcext:value-type="float">
            <text:p><text:s/>(22,581.30)</text:p>
          </table:table-cell>
          <table:table-cell table:style-name="ce521" table:formula="of:=+[.AY12]" office:value-type="float" office:value="-43406.3003797966" calcext:value-type="float">
            <text:p><text:s/>(43,406.30)</text:p>
          </table:table-cell>
          <table:table-cell table:number-columns-repeated="2"/>
          <table:table-cell table:style-name="ce723" office:value-type="string" calcext:value-type="string">
            <text:p>II.3. IMPUESTO A LA RENTA</text:p>
          </table:table-cell>
          <table:table-cell table:style-name="ce733"/>
          <table:table-cell table:style-name="ce521" table:formula="of:=+[.BD12]" office:value-type="float" office:value="705.980139521147" calcext:value-type="float">
            <text:p><text:s/>705.98 </text:p>
          </table:table-cell>
          <table:table-cell table:style-name="ce521" table:formula="of:=+[.BE12]" office:value-type="float" office:value="-22581.2969899661" calcext:value-type="float">
            <text:p><text:s/>(22,581.30)</text:p>
          </table:table-cell>
          <table:table-cell table:style-name="ce521" table:formula="of:=+[.BF12]" office:value-type="float" office:value="-22581.2969899661" calcext:value-type="float">
            <text:p><text:s/>(22,581.30)</text:p>
          </table:table-cell>
          <table:table-cell table:style-name="ce521" table:formula="of:=+[.BG12]" office:value-type="float" office:value="-22581.2969899661" calcext:value-type="float">
            <text:p><text:s/>(22,581.30)</text:p>
          </table:table-cell>
          <table:table-cell table:style-name="ce521" table:formula="of:=+[.BH12]" office:value-type="float" office:value="-43406.3003797966" calcext:value-type="float">
            <text:p><text:s/>(43,406.30)</text:p>
          </table:table-cell>
          <table:table-cell table:number-columns-repeated="2"/>
          <table:table-cell table:style-name="ce723" office:value-type="string" calcext:value-type="string">
            <text:p>II.3. IMPUESTO A LA RENTA</text:p>
          </table:table-cell>
          <table:table-cell table:style-name="ce733"/>
          <table:table-cell table:style-name="ce521" table:formula="of:=+[.BM12]" office:value-type="float" office:value="705.980139521147" calcext:value-type="float">
            <text:p><text:s/>705.98 </text:p>
          </table:table-cell>
          <table:table-cell table:style-name="ce521" table:formula="of:=+[.BN12]" office:value-type="float" office:value="-22581.2969899661" calcext:value-type="float">
            <text:p><text:s/>(22,581.30)</text:p>
          </table:table-cell>
          <table:table-cell table:style-name="ce521" table:formula="of:=+[.BO12]" office:value-type="float" office:value="-22581.2969899661" calcext:value-type="float">
            <text:p><text:s/>(22,581.30)</text:p>
          </table:table-cell>
          <table:table-cell table:style-name="ce521" table:formula="of:=+[.BP12]" office:value-type="float" office:value="-22581.2969899661" calcext:value-type="float">
            <text:p><text:s/>(22,581.30)</text:p>
          </table:table-cell>
          <table:table-cell table:style-name="ce521" table:formula="of:=+[.BQ12]" office:value-type="float" office:value="-43406.3003797966" calcext:value-type="float">
            <text:p><text:s/>(43,406.30)</text:p>
          </table:table-cell>
          <table:table-cell table:number-columns-repeated="16306"/>
        </table:table-row>
        <table:table-row table:style-name="ro1">
          <table:table-cell table:style-name="ce783" table:number-columns-repeated="12"/>
          <table:table-cell table:number-columns-repeated="5"/>
          <table:table-cell table:style-name="ce656" office:value-type="string" calcext:value-type="string">
            <text:p>II.4. INVERSION FIJA </text:p>
          </table:table-cell>
          <table:table-cell table:style-name="ce731" table:formula="of:=-SUM([.S14:.S18])" office:value-type="float" office:value="-140058.565385523" calcext:value-type="float">
            <text:p><text:s/>(140,058.57)</text:p>
          </table:table-cell>
          <table:table-cell table:style-name="ce521" table:number-columns-repeated="5"/>
          <table:table-cell table:number-columns-repeated="2"/>
          <table:table-cell table:style-name="ce656" office:value-type="string" calcext:value-type="string">
            <text:p>II.4. INVERSION FIJA </text:p>
          </table:table-cell>
          <table:table-cell table:style-name="ce731" table:formula="of:=-SUM([.AB14:.AB18])" office:value-type="float" office:value="-140058.565385523" calcext:value-type="float">
            <text:p><text:s/>(140,058.57)</text:p>
          </table:table-cell>
          <table:table-cell table:style-name="ce521" table:number-columns-repeated="5"/>
          <table:table-cell table:number-columns-repeated="2"/>
          <table:table-cell table:style-name="ce656" office:value-type="string" calcext:value-type="string">
            <text:p>II.4. INVERSION FIJA </text:p>
          </table:table-cell>
          <table:table-cell table:style-name="ce731" table:formula="of:=-SUM([.AK14:.AK18])" office:value-type="float" office:value="-140058.565385523" calcext:value-type="float">
            <text:p><text:s/>(140,058.57)</text:p>
          </table:table-cell>
          <table:table-cell table:style-name="ce521" table:number-columns-repeated="5"/>
          <table:table-cell table:number-columns-repeated="2"/>
          <table:table-cell table:style-name="ce656" office:value-type="string" calcext:value-type="string">
            <text:p>II.4. INVERSION FIJA </text:p>
          </table:table-cell>
          <table:table-cell table:style-name="ce731" table:formula="of:=-SUM([.AT14:.AT18])" office:value-type="float" office:value="-140058.565385523" calcext:value-type="float">
            <text:p><text:s/>(140,058.57)</text:p>
          </table:table-cell>
          <table:table-cell table:style-name="ce521" table:number-columns-repeated="5"/>
          <table:table-cell table:number-columns-repeated="2"/>
          <table:table-cell table:style-name="ce656" office:value-type="string" calcext:value-type="string">
            <text:p>II.4. INVERSION FIJA </text:p>
          </table:table-cell>
          <table:table-cell table:style-name="ce731" table:formula="of:=-SUM([.BC14:.BC18])" office:value-type="float" office:value="-140058.565385523" calcext:value-type="float">
            <text:p><text:s/>(140,058.57)</text:p>
          </table:table-cell>
          <table:table-cell table:style-name="ce521" table:number-columns-repeated="5"/>
          <table:table-cell table:number-columns-repeated="2"/>
          <table:table-cell table:style-name="ce656" office:value-type="string" calcext:value-type="string">
            <text:p>II.4. INVERSION FIJA </text:p>
          </table:table-cell>
          <table:table-cell table:style-name="ce731" table:formula="of:=-SUM([.BL14:.BL18])" office:value-type="float" office:value="-140058.565385523" calcext:value-type="float">
            <text:p><text:s/>(140,058.57)</text:p>
          </table:table-cell>
          <table:table-cell table:style-name="ce521" table:number-columns-repeated="5"/>
          <table:table-cell table:number-columns-repeated="2"/>
          <table:table-cell table:style-name="ce656" office:value-type="string" calcext:value-type="string">
            <text:p>II.4. INVERSION FIJA </text:p>
          </table:table-cell>
          <table:table-cell table:style-name="ce731" table:formula="of:=-SUM([.BU14:.BU18])" office:value-type="float" office:value="-140058.565385523" calcext:value-type="float">
            <text:p><text:s/>(140,058.57)</text:p>
          </table:table-cell>
          <table:table-cell table:style-name="ce521" table:number-columns-repeated="5"/>
          <table:table-cell table:number-columns-repeated="16306"/>
        </table:table-row>
        <table:table-row table:style-name="ro1">
          <table:table-cell table:style-name="ce783" table:number-columns-repeated="5"/>
          <table:table-cell table:style-name="ce780" office:value-type="string" calcext:value-type="string" table:number-columns-spanned="6" table:number-rows-spanned="1">
            <text:p>PUNTO DE QUIEBRE UTILIZANDO EL METODO DE ANALISIS DE SENSIBILIDAD</text:p>
          </table:table-cell>
          <table:covered-table-cell table:number-columns-repeated="5" table:style-name="ce780"/>
          <table:table-cell table:style-name="ce783"/>
          <table:table-cell table:number-columns-repeated="5"/>
          <table:table-cell table:style-name="ce656" office:value-type="string" calcext:value-type="string">
            <text:p><text:s text:c="3"/>ACTIVO FIJO</text:p>
          </table:table-cell>
          <table:table-cell table:style-name="ce732" table:formula="of:=+[$'FLUJO DE CAJA '.B18]" office:value-type="float" office:value="103076" calcext:value-type="float">
            <text:p><text:s/>103,076.00 </text:p>
          </table:table-cell>
          <table:table-cell table:style-name="ce521" table:number-columns-repeated="5"/>
          <table:table-cell table:number-columns-repeated="2"/>
          <table:table-cell table:style-name="ce656" office:value-type="string" calcext:value-type="string">
            <text:p><text:s text:c="3"/>ACTIVO FIJO</text:p>
          </table:table-cell>
          <table:table-cell table:style-name="ce732" table:formula="of:=+[.S14]" office:value-type="float" office:value="103076" calcext:value-type="float">
            <text:p><text:s/>103,076.00 </text:p>
          </table:table-cell>
          <table:table-cell table:style-name="ce521" table:number-columns-repeated="5"/>
          <table:table-cell table:number-columns-repeated="2"/>
          <table:table-cell table:style-name="ce656" office:value-type="string" calcext:value-type="string">
            <text:p><text:s text:c="3"/>ACTIVO FIJO</text:p>
          </table:table-cell>
          <table:table-cell table:style-name="ce732" table:formula="of:=+[.AB14]" office:value-type="float" office:value="103076" calcext:value-type="float">
            <text:p><text:s/>103,076.00 </text:p>
          </table:table-cell>
          <table:table-cell table:style-name="ce521" table:number-columns-repeated="5"/>
          <table:table-cell table:number-columns-repeated="2"/>
          <table:table-cell table:style-name="ce656" office:value-type="string" calcext:value-type="string">
            <text:p><text:s text:c="3"/>ACTIVO FIJO</text:p>
          </table:table-cell>
          <table:table-cell table:style-name="ce732" table:formula="of:=+[.AK14]" office:value-type="float" office:value="103076" calcext:value-type="float">
            <text:p><text:s/>103,076.00 </text:p>
          </table:table-cell>
          <table:table-cell table:style-name="ce521" table:number-columns-repeated="5"/>
          <table:table-cell table:number-columns-repeated="2"/>
          <table:table-cell table:style-name="ce656" office:value-type="string" calcext:value-type="string">
            <text:p><text:s text:c="3"/>ACTIVO FIJO</text:p>
          </table:table-cell>
          <table:table-cell table:style-name="ce732" table:formula="of:=+[.AT14]" office:value-type="float" office:value="103076" calcext:value-type="float">
            <text:p><text:s/>103,076.00 </text:p>
          </table:table-cell>
          <table:table-cell table:style-name="ce521" table:number-columns-repeated="5"/>
          <table:table-cell table:number-columns-repeated="2"/>
          <table:table-cell table:style-name="ce656" office:value-type="string" calcext:value-type="string">
            <text:p><text:s text:c="3"/>ACTIVO FIJO</text:p>
          </table:table-cell>
          <table:table-cell table:style-name="ce732" table:formula="of:=+[.BC14]" office:value-type="float" office:value="103076" calcext:value-type="float">
            <text:p><text:s/>103,076.00 </text:p>
          </table:table-cell>
          <table:table-cell table:style-name="ce521" table:number-columns-repeated="5"/>
          <table:table-cell table:number-columns-repeated="2"/>
          <table:table-cell table:style-name="ce656" office:value-type="string" calcext:value-type="string">
            <text:p><text:s text:c="3"/>ACTIVO FIJO</text:p>
          </table:table-cell>
          <table:table-cell table:style-name="ce732" table:formula="of:=+[.BL14]" office:value-type="float" office:value="103076" calcext:value-type="float">
            <text:p><text:s/>103,076.00 </text:p>
          </table:table-cell>
          <table:table-cell table:style-name="ce521" table:number-columns-repeated="5"/>
          <table:table-cell table:number-columns-repeated="16306"/>
        </table:table-row>
        <table:table-row table:style-name="ro14">
          <table:table-cell table:style-name="ce784" office:value-type="string" calcext:value-type="string" table:number-columns-spanned="3" table:number-rows-spanned="1">
            <text:p>Caida de la produccion en</text:p>
          </table:table-cell>
          <table:covered-table-cell table:number-columns-repeated="2" table:style-name="ce784"/>
          <table:table-cell table:style-name="ce796" office:value-type="percentage" office:value="0.05" calcext:value-type="percentage">
            <text:p>5 %</text:p>
          </table:table-cell>
          <table:table-cell table:style-name="ce799"/>
          <table:table-cell table:style-name="ce590" office:value-type="string" calcext:value-type="string">
            <text:p>VARIABLES</text:p>
          </table:table-cell>
          <table:table-cell table:style-name="ce590" office:value-type="string" calcext:value-type="string">
            <text:p>VARIACION</text:p>
          </table:table-cell>
          <table:table-cell table:style-name="ce590" office:value-type="string" calcext:value-type="string">
            <text:p>VANE INICIAL</text:p>
          </table:table-cell>
          <table:table-cell table:style-name="ce590" office:value-type="string" calcext:value-type="string">
            <text:p>TIRE INICIAL</text:p>
          </table:table-cell>
          <table:table-cell table:style-name="ce590" office:value-type="string" calcext:value-type="string">
            <text:p>VAN FINAL</text:p>
          </table:table-cell>
          <table:table-cell table:style-name="ce590" office:value-type="string" calcext:value-type="string">
            <text:p>TIR FINAL</text:p>
          </table:table-cell>
          <table:table-cell table:style-name="ce799"/>
          <table:table-cell table:style-name="ce816"/>
          <table:table-cell table:style-name="ce819" table:formula="of:=+[.N3]-[.D15]" office:value-type="percentage" office:value="0.95" calcext:value-type="percentage">
            <text:p>95 %</text:p>
          </table:table-cell>
          <table:table-cell table:style-name="ce819" table:formula="of:=+[.O3]" office:value-type="percentage" office:value="1" calcext:value-type="percentage">
            <text:p>100 %</text:p>
          </table:table-cell>
          <table:table-cell table:style-name="ce816" table:number-columns-repeated="2"/>
          <table:table-cell table:style-name="ce656" office:value-type="string" calcext:value-type="string">
            <text:p><text:s text:c="3"/>ACTIVO INTANGIBLE</text:p>
          </table:table-cell>
          <table:table-cell table:style-name="ce732" table:formula="of:=+[$'FLUJO DE CAJA '.B19]" office:value-type="float" office:value="18250" calcext:value-type="float">
            <text:p><text:s/>18,250.00 </text:p>
          </table:table-cell>
          <table:table-cell table:style-name="ce521" table:number-columns-repeated="5"/>
          <table:table-cell/>
          <table:table-cell table:style-name="ce816"/>
          <table:table-cell table:style-name="ce656" office:value-type="string" calcext:value-type="string">
            <text:p><text:s text:c="3"/>ACTIVO INTANGIBLE</text:p>
          </table:table-cell>
          <table:table-cell table:style-name="ce732" table:formula="of:=+[.S15]" office:value-type="float" office:value="18250" calcext:value-type="float">
            <text:p><text:s/>18,250.00 </text:p>
          </table:table-cell>
          <table:table-cell table:style-name="ce521" table:number-columns-repeated="5"/>
          <table:table-cell/>
          <table:table-cell table:style-name="ce816"/>
          <table:table-cell table:style-name="ce656" office:value-type="string" calcext:value-type="string">
            <text:p><text:s text:c="3"/>ACTIVO INTANGIBLE</text:p>
          </table:table-cell>
          <table:table-cell table:style-name="ce732" table:formula="of:=+[.AB15]" office:value-type="float" office:value="18250" calcext:value-type="float">
            <text:p><text:s/>18,250.00 </text:p>
          </table:table-cell>
          <table:table-cell table:style-name="ce521" table:number-columns-repeated="5"/>
          <table:table-cell/>
          <table:table-cell table:style-name="ce816"/>
          <table:table-cell table:style-name="ce656" office:value-type="string" calcext:value-type="string">
            <text:p><text:s text:c="3"/>ACTIVO INTANGIBLE</text:p>
          </table:table-cell>
          <table:table-cell table:style-name="ce732" table:formula="of:=+[.AK15]" office:value-type="float" office:value="18250" calcext:value-type="float">
            <text:p><text:s/>18,250.00 </text:p>
          </table:table-cell>
          <table:table-cell table:style-name="ce521" table:number-columns-repeated="5"/>
          <table:table-cell/>
          <table:table-cell table:style-name="ce816"/>
          <table:table-cell table:style-name="ce656" office:value-type="string" calcext:value-type="string">
            <text:p><text:s text:c="3"/>ACTIVO INTANGIBLE</text:p>
          </table:table-cell>
          <table:table-cell table:style-name="ce732" table:formula="of:=+[.AT15]" office:value-type="float" office:value="18250" calcext:value-type="float">
            <text:p><text:s/>18,250.00 </text:p>
          </table:table-cell>
          <table:table-cell table:style-name="ce521" table:number-columns-repeated="5"/>
          <table:table-cell/>
          <table:table-cell table:style-name="ce816"/>
          <table:table-cell table:style-name="ce656" office:value-type="string" calcext:value-type="string">
            <text:p><text:s text:c="3"/>ACTIVO INTANGIBLE</text:p>
          </table:table-cell>
          <table:table-cell table:style-name="ce732" table:formula="of:=+[.BC15]" office:value-type="float" office:value="18250" calcext:value-type="float">
            <text:p><text:s/>18,250.00 </text:p>
          </table:table-cell>
          <table:table-cell table:style-name="ce521" table:number-columns-repeated="5"/>
          <table:table-cell/>
          <table:table-cell table:style-name="ce816"/>
          <table:table-cell table:style-name="ce656" office:value-type="string" calcext:value-type="string">
            <text:p><text:s text:c="3"/>ACTIVO INTANGIBLE</text:p>
          </table:table-cell>
          <table:table-cell table:style-name="ce732" table:formula="of:=+[.BL15]" office:value-type="float" office:value="18250" calcext:value-type="float">
            <text:p><text:s/>18,250.00 </text:p>
          </table:table-cell>
          <table:table-cell table:style-name="ce521" table:number-columns-repeated="5"/>
          <table:table-cell/>
          <table:table-cell table:style-name="ce816" table:number-columns-repeated="16305"/>
        </table:table-row>
        <table:table-row table:style-name="ro1">
          <table:table-cell table:style-name="ce537" office:value-type="string" calcext:value-type="string">
            <text:p>AÑO</text:p>
          </table:table-cell>
          <table:table-cell table:style-name="ce537" office:value-type="string" calcext:value-type="string">
            <text:p>FCE</text:p>
          </table:table-cell>
          <table:table-cell table:style-name="ce537" office:value-type="string" calcext:value-type="string">
            <text:p>FA</text:p>
          </table:table-cell>
          <table:table-cell table:style-name="ce537" office:value-type="string" calcext:value-type="string">
            <text:p>VAN</text:p>
          </table:table-cell>
          <table:table-cell table:style-name="ce785"/>
          <table:table-cell table:style-name="ce801" office:value-type="string" calcext:value-type="string">
            <text:p>Situacion inicial</text:p>
          </table:table-cell>
          <table:table-cell table:style-name="ce807" office:value-type="float" office:value="0" calcext:value-type="float">
            <text:p>0</text:p>
          </table:table-cell>
          <table:table-cell table:style-name="ce810" table:formula="of:=[.D11]" office:value-type="float" office:value="50101.1915976451" calcext:value-type="float">
            <text:p><text:s/>50,101.19 </text:p>
          </table:table-cell>
          <table:table-cell table:style-name="ce813" table:formula="of:=[.D12]" office:value-type="percentage" office:value="0.302559974713295" calcext:value-type="percentage">
            <text:p>30.26 %</text:p>
          </table:table-cell>
          <table:table-cell table:style-name="ce781" table:number-columns-repeated="2"/>
          <table:table-cell table:style-name="ce783"/>
          <table:table-cell table:style-name="ce227" office:value-type="string" calcext:value-type="string" table:number-columns-spanned="1" table:number-rows-spanned="2">
            <text:p>Años</text:p>
          </table:table-cell>
          <table:table-cell table:style-name="ce227" office:value-type="string" calcext:value-type="string" table:number-columns-spanned="1" table:number-rows-spanned="2">
            <text:p>Produccion (UND.)</text:p>
          </table:table-cell>
          <table:table-cell table:style-name="ce227" office:value-type="string" calcext:value-type="string" table:number-columns-spanned="1" table:number-rows-spanned="2">
            <text:p>Precio por Und (S/.)</text:p>
          </table:table-cell>
          <table:table-cell table:style-name="ce227" office:value-type="string" calcext:value-type="string" table:number-columns-spanned="1" table:number-rows-spanned="2">
            <text:p>Ventas proyectadas (S/.)</text:p>
          </table:table-cell>
          <table:table-cell/>
          <table:table-cell table:style-name="ce656" office:value-type="string" calcext:value-type="string">
            <text:p><text:s text:c="3"/>CAPITAL DE TRABAJO</text:p>
          </table:table-cell>
          <table:table-cell table:style-name="ce732" table:formula="of:=+[$'FLUJO DE CAJA '.B20]" office:value-type="float" office:value="4173.44538552312" calcext:value-type="float">
            <text:p><text:s/>4,173.45 </text:p>
          </table:table-cell>
          <table:table-cell table:style-name="ce521" table:formula="of:=+[$'FLUJO DE CAJA '.C20]" office:value-type="float" office:value="-817.086613949785" calcext:value-type="float">
            <text:p><text:s/>(817.09)</text:p>
          </table:table-cell>
          <table:table-cell table:style-name="ce521" table:formula="of:=+[$'FLUJO DE CAJA '.D20]" office:value-type="float" office:value="-980.503936739741" calcext:value-type="float">
            <text:p><text:s/>(980.50)</text:p>
          </table:table-cell>
          <table:table-cell table:style-name="ce521" table:formula="of:=+[$'FLUJO DE CAJA '.E20]" office:value-type="float" office:value="-1176.60472408769" calcext:value-type="float">
            <text:p><text:s/>(1,176.60)</text:p>
          </table:table-cell>
          <table:table-cell table:style-name="ce521" table:formula="of:=+[$'FLUJO DE CAJA '.F20]" office:value-type="float" office:value="-1411.92566890523" calcext:value-type="float">
            <text:p><text:s/>(1,411.93)</text:p>
          </table:table-cell>
          <table:table-cell table:style-name="ce521" table:formula="of:=+[$'FLUJO DE CAJA '.G20]" office:value-type="float" office:value="-1694.31080268627" calcext:value-type="float">
            <text:p><text:s/>(1,694.31)</text:p>
          </table:table-cell>
          <table:table-cell table:style-name="ce816"/>
          <table:table-cell/>
          <table:table-cell table:style-name="ce656" office:value-type="string" calcext:value-type="string">
            <text:p><text:s text:c="3"/>CAPITAL DE TRABAJO</text:p>
          </table:table-cell>
          <table:table-cell table:style-name="ce732" table:formula="of:=+[.S16]" office:value-type="float" office:value="4173.44538552312" calcext:value-type="float">
            <text:p><text:s/>4,173.45 </text:p>
          </table:table-cell>
          <table:table-cell table:style-name="ce521" table:formula="of:=+[.T16]" office:value-type="float" office:value="-817.086613949785" calcext:value-type="float">
            <text:p><text:s/>(817.09)</text:p>
          </table:table-cell>
          <table:table-cell table:style-name="ce521" table:formula="of:=+[.U16]" office:value-type="float" office:value="-980.503936739741" calcext:value-type="float">
            <text:p><text:s/>(980.50)</text:p>
          </table:table-cell>
          <table:table-cell table:style-name="ce521" table:formula="of:=+[.V16]" office:value-type="float" office:value="-1176.60472408769" calcext:value-type="float">
            <text:p><text:s/>(1,176.60)</text:p>
          </table:table-cell>
          <table:table-cell table:style-name="ce521" table:formula="of:=+[.W16]" office:value-type="float" office:value="-1411.92566890523" calcext:value-type="float">
            <text:p><text:s/>(1,411.93)</text:p>
          </table:table-cell>
          <table:table-cell table:style-name="ce521" table:formula="of:=+[.X16]" office:value-type="float" office:value="-1694.31080268627" calcext:value-type="float">
            <text:p><text:s/>(1,694.31)</text:p>
          </table:table-cell>
          <table:table-cell table:style-name="ce816"/>
          <table:table-cell/>
          <table:table-cell table:style-name="ce656" office:value-type="string" calcext:value-type="string">
            <text:p><text:s text:c="3"/>CAPITAL DE TRABAJO</text:p>
          </table:table-cell>
          <table:table-cell table:style-name="ce732" table:formula="of:=+[.AB16]" office:value-type="float" office:value="4173.44538552312" calcext:value-type="float">
            <text:p><text:s/>4,173.45 </text:p>
          </table:table-cell>
          <table:table-cell table:style-name="ce521" table:formula="of:=+[.AC16]" office:value-type="float" office:value="-817.086613949785" calcext:value-type="float">
            <text:p><text:s/>(817.09)</text:p>
          </table:table-cell>
          <table:table-cell table:style-name="ce521" table:formula="of:=+[.AD16]" office:value-type="float" office:value="-980.503936739741" calcext:value-type="float">
            <text:p><text:s/>(980.50)</text:p>
          </table:table-cell>
          <table:table-cell table:style-name="ce521" table:formula="of:=+[.AE16]" office:value-type="float" office:value="-1176.60472408769" calcext:value-type="float">
            <text:p><text:s/>(1,176.60)</text:p>
          </table:table-cell>
          <table:table-cell table:style-name="ce521" table:formula="of:=+[.AF16]" office:value-type="float" office:value="-1411.92566890523" calcext:value-type="float">
            <text:p><text:s/>(1,411.93)</text:p>
          </table:table-cell>
          <table:table-cell table:style-name="ce521" table:formula="of:=+[.AG16]" office:value-type="float" office:value="-1694.31080268627" calcext:value-type="float">
            <text:p><text:s/>(1,694.31)</text:p>
          </table:table-cell>
          <table:table-cell table:style-name="ce816"/>
          <table:table-cell/>
          <table:table-cell table:style-name="ce656" office:value-type="string" calcext:value-type="string">
            <text:p><text:s text:c="3"/>CAPITAL DE TRABAJO</text:p>
          </table:table-cell>
          <table:table-cell table:style-name="ce732" table:formula="of:=+[.AK16]" office:value-type="float" office:value="4173.44538552312" calcext:value-type="float">
            <text:p><text:s/>4,173.45 </text:p>
          </table:table-cell>
          <table:table-cell table:style-name="ce521" table:formula="of:=+[.AL16]" office:value-type="float" office:value="-817.086613949785" calcext:value-type="float">
            <text:p><text:s/>(817.09)</text:p>
          </table:table-cell>
          <table:table-cell table:style-name="ce521" table:formula="of:=+[.AM16]" office:value-type="float" office:value="-980.503936739741" calcext:value-type="float">
            <text:p><text:s/>(980.50)</text:p>
          </table:table-cell>
          <table:table-cell table:style-name="ce521" table:formula="of:=+[.AN16]" office:value-type="float" office:value="-1176.60472408769" calcext:value-type="float">
            <text:p><text:s/>(1,176.60)</text:p>
          </table:table-cell>
          <table:table-cell table:style-name="ce521" table:formula="of:=+[.AO16]" office:value-type="float" office:value="-1411.92566890523" calcext:value-type="float">
            <text:p><text:s/>(1,411.93)</text:p>
          </table:table-cell>
          <table:table-cell table:style-name="ce521" table:formula="of:=+[.AP16]" office:value-type="float" office:value="-1694.31080268627" calcext:value-type="float">
            <text:p><text:s/>(1,694.31)</text:p>
          </table:table-cell>
          <table:table-cell table:style-name="ce816"/>
          <table:table-cell/>
          <table:table-cell table:style-name="ce656" office:value-type="string" calcext:value-type="string">
            <text:p><text:s text:c="3"/>CAPITAL DE TRABAJO</text:p>
          </table:table-cell>
          <table:table-cell table:style-name="ce732" table:formula="of:=+[.AT16]" office:value-type="float" office:value="4173.44538552312" calcext:value-type="float">
            <text:p><text:s/>4,173.45 </text:p>
          </table:table-cell>
          <table:table-cell table:style-name="ce521" table:formula="of:=+[.AU16]" office:value-type="float" office:value="-817.086613949785" calcext:value-type="float">
            <text:p><text:s/>(817.09)</text:p>
          </table:table-cell>
          <table:table-cell table:style-name="ce521" table:formula="of:=+[.AV16]" office:value-type="float" office:value="-980.503936739741" calcext:value-type="float">
            <text:p><text:s/>(980.50)</text:p>
          </table:table-cell>
          <table:table-cell table:style-name="ce521" table:formula="of:=+[.AW16]" office:value-type="float" office:value="-1176.60472408769" calcext:value-type="float">
            <text:p><text:s/>(1,176.60)</text:p>
          </table:table-cell>
          <table:table-cell table:style-name="ce521" table:formula="of:=+[.AX16]" office:value-type="float" office:value="-1411.92566890523" calcext:value-type="float">
            <text:p><text:s/>(1,411.93)</text:p>
          </table:table-cell>
          <table:table-cell table:style-name="ce521" table:formula="of:=+[.AY16]" office:value-type="float" office:value="-1694.31080268627" calcext:value-type="float">
            <text:p><text:s/>(1,694.31)</text:p>
          </table:table-cell>
          <table:table-cell table:style-name="ce816"/>
          <table:table-cell/>
          <table:table-cell table:style-name="ce656" office:value-type="string" calcext:value-type="string">
            <text:p><text:s text:c="3"/>CAPITAL DE TRABAJO</text:p>
          </table:table-cell>
          <table:table-cell table:style-name="ce732" table:formula="of:=+[.BC16]" office:value-type="float" office:value="4173.44538552312" calcext:value-type="float">
            <text:p><text:s/>4,173.45 </text:p>
          </table:table-cell>
          <table:table-cell table:style-name="ce521" table:formula="of:=+[.BD16]" office:value-type="float" office:value="-817.086613949785" calcext:value-type="float">
            <text:p><text:s/>(817.09)</text:p>
          </table:table-cell>
          <table:table-cell table:style-name="ce521" table:formula="of:=+[.BE16]" office:value-type="float" office:value="-980.503936739741" calcext:value-type="float">
            <text:p><text:s/>(980.50)</text:p>
          </table:table-cell>
          <table:table-cell table:style-name="ce521" table:formula="of:=+[.BF16]" office:value-type="float" office:value="-1176.60472408769" calcext:value-type="float">
            <text:p><text:s/>(1,176.60)</text:p>
          </table:table-cell>
          <table:table-cell table:style-name="ce521" table:formula="of:=+[.BG16]" office:value-type="float" office:value="-1411.92566890523" calcext:value-type="float">
            <text:p><text:s/>(1,411.93)</text:p>
          </table:table-cell>
          <table:table-cell table:style-name="ce521" table:formula="of:=+[.BH16]" office:value-type="float" office:value="-1694.31080268627" calcext:value-type="float">
            <text:p><text:s/>(1,694.31)</text:p>
          </table:table-cell>
          <table:table-cell table:style-name="ce816"/>
          <table:table-cell/>
          <table:table-cell table:style-name="ce656" office:value-type="string" calcext:value-type="string">
            <text:p><text:s text:c="3"/>CAPITAL DE TRABAJO</text:p>
          </table:table-cell>
          <table:table-cell table:style-name="ce732" table:formula="of:=+[.BL16]" office:value-type="float" office:value="4173.44538552312" calcext:value-type="float">
            <text:p><text:s/>4,173.45 </text:p>
          </table:table-cell>
          <table:table-cell table:style-name="ce521" table:formula="of:=+[.BM16]" office:value-type="float" office:value="-817.086613949785" calcext:value-type="float">
            <text:p><text:s/>(817.09)</text:p>
          </table:table-cell>
          <table:table-cell table:style-name="ce521" table:formula="of:=+[.BN16]" office:value-type="float" office:value="-980.503936739741" calcext:value-type="float">
            <text:p><text:s/>(980.50)</text:p>
          </table:table-cell>
          <table:table-cell table:style-name="ce521" table:formula="of:=+[.BO16]" office:value-type="float" office:value="-1176.60472408769" calcext:value-type="float">
            <text:p><text:s/>(1,176.60)</text:p>
          </table:table-cell>
          <table:table-cell table:style-name="ce521" table:formula="of:=+[.BP16]" office:value-type="float" office:value="-1411.92566890523" calcext:value-type="float">
            <text:p><text:s/>(1,411.93)</text:p>
          </table:table-cell>
          <table:table-cell table:style-name="ce521" table:formula="of:=+[.BQ16]" office:value-type="float" office:value="-1694.31080268627" calcext:value-type="float">
            <text:p><text:s/>(1,694.31)</text:p>
          </table:table-cell>
          <table:table-cell table:style-name="ce816"/>
          <table:table-cell table:number-columns-repeated="16305"/>
        </table:table-row>
        <table:table-row table:style-name="ro1">
          <table:table-cell table:style-name="ce781" office:value-type="float" office:value="0" calcext:value-type="float">
            <text:p>0</text:p>
          </table:table-cell>
          <table:table-cell table:style-name="ce789" table:formula="of:=+[.AB19]" office:value-type="float" office:value="-140058.565385523" calcext:value-type="float">
            <text:p><text:s/>(140,058.57)</text:p>
          </table:table-cell>
          <table:table-cell table:style-name="ce792" table:formula="of:=1/(1+[.$B$1])^[.A17]" office:value-type="float" office:value="1" calcext:value-type="float">
            <text:p><text:s/>1.00 </text:p>
          </table:table-cell>
          <table:table-cell table:style-name="ce789" table:formula="of:=[.B17]*[.C17]" office:value-type="float" office:value="-140058.565385523" calcext:value-type="float">
            <text:p><text:s/>(140,058.57)</text:p>
          </table:table-cell>
          <table:table-cell table:style-name="ce785"/>
          <table:table-cell table:style-name="ce802" office:value-type="string" calcext:value-type="string" table:number-columns-spanned="1" table:number-rows-spanned="3">
            <text:p>Caida de la Produccion</text:p>
          </table:table-cell>
          <table:table-cell table:style-name="ce808" table:formula="of:=-+[.D15]" office:value-type="percentage" office:value="-0.05" calcext:value-type="percentage">
            <text:p>-5 %</text:p>
          </table:table-cell>
          <table:table-cell table:style-name="ce811" table:number-columns-repeated="2"/>
          <table:table-cell table:style-name="ce814" table:formula="of:=[.D23]" office:value-type="float" office:value="22809.1510490105" calcext:value-type="float">
            <text:p><text:s/>22,809.15 </text:p>
          </table:table-cell>
          <table:table-cell table:style-name="ce809" table:formula="of:=[.D24]" office:value-type="percentage" office:value="0.246236029874088" calcext:value-type="percentage">
            <text:p>25 %</text:p>
          </table:table-cell>
          <table:table-cell table:style-name="ce783"/>
          <table:covered-table-cell table:number-columns-repeated="4" table:style-name="ce227"/>
          <table:table-cell/>
          <table:table-cell table:style-name="ce395" office:value-type="string" calcext:value-type="string">
            <text:p><text:s text:c="3"/>GASTOS GENERALES</text:p>
          </table:table-cell>
          <table:table-cell table:style-name="ce732" table:formula="of:=+[$'FLUJO DE CAJA '.B21]" office:value-type="float" office:value="9706.08" calcext:value-type="float">
            <text:p><text:s/>9,706.08 </text:p>
          </table:table-cell>
          <table:table-cell table:style-name="ce521" table:number-columns-repeated="5"/>
          <table:table-cell table:number-columns-repeated="2"/>
          <table:table-cell table:style-name="ce395" office:value-type="string" calcext:value-type="string">
            <text:p><text:s text:c="3"/>GASTOS GENERALES</text:p>
          </table:table-cell>
          <table:table-cell table:style-name="ce732" table:formula="of:=+[.S17]" office:value-type="float" office:value="9706.08" calcext:value-type="float">
            <text:p><text:s/>9,706.08 </text:p>
          </table:table-cell>
          <table:table-cell table:style-name="ce521" table:number-columns-repeated="5"/>
          <table:table-cell table:number-columns-repeated="2"/>
          <table:table-cell table:style-name="ce395" office:value-type="string" calcext:value-type="string">
            <text:p><text:s text:c="3"/>GASTOS GENERALES</text:p>
          </table:table-cell>
          <table:table-cell table:style-name="ce732" table:formula="of:=+[.AB17]" office:value-type="float" office:value="9706.08" calcext:value-type="float">
            <text:p><text:s/>9,706.08 </text:p>
          </table:table-cell>
          <table:table-cell table:style-name="ce521" table:number-columns-repeated="5"/>
          <table:table-cell table:number-columns-repeated="2"/>
          <table:table-cell table:style-name="ce395" office:value-type="string" calcext:value-type="string">
            <text:p><text:s text:c="3"/>GASTOS GENERALES</text:p>
          </table:table-cell>
          <table:table-cell table:style-name="ce732" table:formula="of:=+[.AK17]" office:value-type="float" office:value="9706.08" calcext:value-type="float">
            <text:p><text:s/>9,706.08 </text:p>
          </table:table-cell>
          <table:table-cell table:style-name="ce521" table:number-columns-repeated="5"/>
          <table:table-cell table:number-columns-repeated="2"/>
          <table:table-cell table:style-name="ce395" office:value-type="string" calcext:value-type="string">
            <text:p><text:s text:c="3"/>GASTOS GENERALES</text:p>
          </table:table-cell>
          <table:table-cell table:style-name="ce732" table:formula="of:=+[.AT17]" office:value-type="float" office:value="9706.08" calcext:value-type="float">
            <text:p><text:s/>9,706.08 </text:p>
          </table:table-cell>
          <table:table-cell table:style-name="ce521" table:number-columns-repeated="5"/>
          <table:table-cell table:number-columns-repeated="2"/>
          <table:table-cell table:style-name="ce395" office:value-type="string" calcext:value-type="string">
            <text:p><text:s text:c="3"/>GASTOS GENERALES</text:p>
          </table:table-cell>
          <table:table-cell table:style-name="ce732" table:formula="of:=+[.BC17]" office:value-type="float" office:value="9706.08" calcext:value-type="float">
            <text:p><text:s/>9,706.08 </text:p>
          </table:table-cell>
          <table:table-cell table:style-name="ce521" table:number-columns-repeated="5"/>
          <table:table-cell table:number-columns-repeated="2"/>
          <table:table-cell table:style-name="ce395" office:value-type="string" calcext:value-type="string">
            <text:p><text:s text:c="3"/>GASTOS GENERALES</text:p>
          </table:table-cell>
          <table:table-cell table:style-name="ce732" table:formula="of:=+[.BL17]" office:value-type="float" office:value="9706.08" calcext:value-type="float">
            <text:p><text:s/>9,706.08 </text:p>
          </table:table-cell>
          <table:table-cell table:style-name="ce521" table:number-columns-repeated="5"/>
          <table:table-cell table:number-columns-repeated="16306"/>
        </table:table-row>
        <table:table-row table:style-name="ro1">
          <table:table-cell table:style-name="ce781" office:value-type="float" office:value="1" calcext:value-type="float">
            <text:p>1</text:p>
          </table:table-cell>
          <table:table-cell table:style-name="ce789" table:formula="of:=+[.AC19]" office:value-type="float" office:value="3970.35682133658" calcext:value-type="float">
            <text:p><text:s/>3,970.36 </text:p>
          </table:table-cell>
          <table:table-cell table:style-name="ce792" table:formula="of:=1/(1+[.$B$1])^[.A18]" office:value-type="float" office:value="0.835620384800877" calcext:value-type="float">
            <text:p><text:s/>0.84 </text:p>
          </table:table-cell>
          <table:table-cell table:style-name="ce789" table:formula="of:=[.B18]*[.C18]" office:value-type="float" office:value="3317.71109484206" calcext:value-type="float">
            <text:p><text:s/>3,317.71 </text:p>
          </table:table-cell>
          <table:table-cell table:style-name="ce800"/>
          <table:covered-table-cell table:style-name="ce803"/>
          <table:table-cell table:style-name="ce809" table:formula="of:=-[.D26]" office:value-type="percentage" office:value="-0.1" calcext:value-type="percentage">
            <text:p>-10 %</text:p>
          </table:table-cell>
          <table:table-cell table:style-name="ce811" table:number-columns-repeated="2"/>
          <table:table-cell table:style-name="ce815" table:formula="of:=[.D34]" office:value-type="float" office:value="-2005.58410903935" calcext:value-type="float">
            <text:p><text:s/>(2,005.58)</text:p>
          </table:table-cell>
          <table:table-cell table:style-name="ce809" table:formula="of:=[.D35]" office:value-type="percentage" office:value="0.192277345480693" calcext:value-type="percentage">
            <text:p>19 %</text:p>
          </table:table-cell>
          <table:table-cell table:style-name="ce783"/>
          <table:table-cell table:style-name="ce224" table:formula="of:=+[.M6]" office:value-type="float" office:value="2021" calcext:value-type="float">
            <text:p>2021</text:p>
          </table:table-cell>
          <table:table-cell table:style-name="ce818" table:formula="of:=+[.N6]*[.$N$15]" office:value-type="float" office:value="3026.41920034825" calcext:value-type="float">
            <text:p>3026.42</text:p>
          </table:table-cell>
          <table:table-cell table:style-name="ce818" table:formula="of:=+[.O6]*[.$O$15]" office:value-type="float" office:value="18" calcext:value-type="float">
            <text:p>18.00</text:p>
          </table:table-cell>
          <table:table-cell table:style-name="ce818" table:formula="of:=[.N18]*[.O18]" office:value-type="float" office:value="54475.5456062685" calcext:value-type="float">
            <text:p>54475.55</text:p>
          </table:table-cell>
          <table:table-cell/>
          <table:table-cell table:style-name="ce395" office:value-type="string" calcext:value-type="string">
            <text:p><text:s text:c="3"/>GASTOS DE SUPERVISION</text:p>
          </table:table-cell>
          <table:table-cell table:style-name="ce732" table:formula="of:=+[$'FLUJO DE CAJA '.B22]" office:value-type="float" office:value="4853.04" calcext:value-type="float">
            <text:p><text:s/>4,853.04 </text:p>
          </table:table-cell>
          <table:table-cell table:style-name="ce521" table:number-columns-repeated="5"/>
          <table:table-cell table:number-columns-repeated="2"/>
          <table:table-cell table:style-name="ce395" office:value-type="string" calcext:value-type="string">
            <text:p><text:s text:c="3"/>GASTOS DE SUPERVISION</text:p>
          </table:table-cell>
          <table:table-cell table:style-name="ce732" table:formula="of:=+[.S18]" office:value-type="float" office:value="4853.04" calcext:value-type="float">
            <text:p><text:s/>4,853.04 </text:p>
          </table:table-cell>
          <table:table-cell table:style-name="ce521" table:number-columns-repeated="5"/>
          <table:table-cell table:number-columns-repeated="2"/>
          <table:table-cell table:style-name="ce395" office:value-type="string" calcext:value-type="string">
            <text:p><text:s text:c="3"/>GASTOS DE SUPERVISION</text:p>
          </table:table-cell>
          <table:table-cell table:style-name="ce732" table:formula="of:=+[.AB18]" office:value-type="float" office:value="4853.04" calcext:value-type="float">
            <text:p><text:s/>4,853.04 </text:p>
          </table:table-cell>
          <table:table-cell table:style-name="ce521" table:number-columns-repeated="5"/>
          <table:table-cell table:number-columns-repeated="2"/>
          <table:table-cell table:style-name="ce395" office:value-type="string" calcext:value-type="string">
            <text:p><text:s text:c="3"/>GASTOS DE SUPERVISION</text:p>
          </table:table-cell>
          <table:table-cell table:style-name="ce732" table:formula="of:=+[.AK18]" office:value-type="float" office:value="4853.04" calcext:value-type="float">
            <text:p><text:s/>4,853.04 </text:p>
          </table:table-cell>
          <table:table-cell table:style-name="ce521" table:number-columns-repeated="5"/>
          <table:table-cell table:number-columns-repeated="2"/>
          <table:table-cell table:style-name="ce395" office:value-type="string" calcext:value-type="string">
            <text:p><text:s text:c="3"/>GASTOS DE SUPERVISION</text:p>
          </table:table-cell>
          <table:table-cell table:style-name="ce732" table:formula="of:=+[.AT18]" office:value-type="float" office:value="4853.04" calcext:value-type="float">
            <text:p><text:s/>4,853.04 </text:p>
          </table:table-cell>
          <table:table-cell table:style-name="ce521" table:number-columns-repeated="5"/>
          <table:table-cell table:number-columns-repeated="2"/>
          <table:table-cell table:style-name="ce395" office:value-type="string" calcext:value-type="string">
            <text:p><text:s text:c="3"/>GASTOS DE SUPERVISION</text:p>
          </table:table-cell>
          <table:table-cell table:style-name="ce732" table:formula="of:=+[.BC18]" office:value-type="float" office:value="4853.04" calcext:value-type="float">
            <text:p><text:s/>4,853.04 </text:p>
          </table:table-cell>
          <table:table-cell table:style-name="ce521" table:number-columns-repeated="5"/>
          <table:table-cell table:number-columns-repeated="2"/>
          <table:table-cell table:style-name="ce395" office:value-type="string" calcext:value-type="string">
            <text:p><text:s text:c="3"/>GASTOS DE SUPERVISION</text:p>
          </table:table-cell>
          <table:table-cell table:style-name="ce732" table:formula="of:=+[.BL18]" office:value-type="float" office:value="4853.04" calcext:value-type="float">
            <text:p><text:s/>4,853.04 </text:p>
          </table:table-cell>
          <table:table-cell table:style-name="ce521" table:number-columns-repeated="5"/>
          <table:table-cell table:number-columns-repeated="16306"/>
        </table:table-row>
        <table:table-row table:style-name="ro1">
          <table:table-cell table:style-name="ce781" office:value-type="float" office:value="2" calcext:value-type="float">
            <text:p>2</text:p>
          </table:table-cell>
          <table:table-cell table:style-name="ce789" table:formula="of:=+[.AD19]" office:value-type="float" office:value="50711.7270466275" calcext:value-type="float">
            <text:p><text:s/>50,711.73 </text:p>
          </table:table-cell>
          <table:table-cell table:style-name="ce792" table:formula="of:=1/(1+[.$B$1])^[.A19]" office:value-type="float" office:value="0.698261427494766" calcext:value-type="float">
            <text:p><text:s/>0.70 </text:p>
          </table:table-cell>
          <table:table-cell table:style-name="ce789" table:formula="of:=[.B19]*[.C19]" office:value-type="float" office:value="35410.042918303" calcext:value-type="float">
            <text:p><text:s/>35,410.04 </text:p>
          </table:table-cell>
          <table:table-cell table:style-name="ce800"/>
          <table:covered-table-cell table:style-name="ce804"/>
          <table:table-cell table:style-name="ce809" table:formula="of:=-[.D37]" office:value-type="percentage" office:value="-0.15" calcext:value-type="percentage">
            <text:p>-15 %</text:p>
          </table:table-cell>
          <table:table-cell table:style-name="ce811" table:number-columns-repeated="2"/>
          <table:table-cell table:style-name="ce815" table:formula="of:=[.D45]" office:value-type="float" office:value="-26820.3192670893" calcext:value-type="float">
            <text:p><text:s/>(26,820.32)</text:p>
          </table:table-cell>
          <table:table-cell table:style-name="ce809" table:formula="of:=[.D46]" office:value-type="percentage" office:value="0.13614815818162" calcext:value-type="percentage">
            <text:p>14 %</text:p>
          </table:table-cell>
          <table:table-cell table:style-name="ce783"/>
          <table:table-cell table:style-name="ce224" table:formula="of:=+[.M7]" office:value-type="float" office:value="2022" calcext:value-type="float">
            <text:p>2022</text:p>
          </table:table-cell>
          <table:table-cell table:style-name="ce818" table:formula="of:=+[.N7]*[.$N$15]" office:value-type="float" office:value="10871.5112" calcext:value-type="float">
            <text:p>10871.51</text:p>
          </table:table-cell>
          <table:table-cell table:style-name="ce818" table:formula="of:=+[.O7]*[.$O$15]" office:value-type="float" office:value="18" calcext:value-type="float">
            <text:p>18.00</text:p>
          </table:table-cell>
          <table:table-cell table:style-name="ce818" table:formula="of:=[.N19]*[.O19]" office:value-type="float" office:value="195687.2016" calcext:value-type="float">
            <text:p>195687.20</text:p>
          </table:table-cell>
          <table:table-cell/>
          <table:table-cell table:style-name="ce724" office:value-type="string" calcext:value-type="string">
            <text:p>FLUJO DE CAJA ECONÒMICO</text:p>
          </table:table-cell>
          <table:table-cell table:style-name="ce735" table:formula="of:=[.S13]" office:value-type="float" office:value="-140058.565385523" calcext:value-type="float">
            <text:p><text:s/>(140,058.57)</text:p>
          </table:table-cell>
          <table:table-cell table:style-name="ce754" table:formula="of:=[.T5]+[.T9]" office:value-type="float" office:value="6837.49080061387" calcext:value-type="float">
            <text:p><text:s/>6,837.49 </text:p>
          </table:table-cell>
          <table:table-cell table:style-name="ce754" table:formula="of:=[.U5]+[.U9]" office:value-type="float" office:value="61011.0534466275" calcext:value-type="float">
            <text:p><text:s/>61,011.05 </text:p>
          </table:table-cell>
          <table:table-cell table:style-name="ce754" table:formula="of:=[.V5]+[.V9]" office:value-type="float" office:value="60814.9526592795" calcext:value-type="float">
            <text:p><text:s/>60,814.95 </text:p>
          </table:table-cell>
          <table:table-cell table:style-name="ce754" table:formula="of:=[.W5]+[.W9]" office:value-type="float" office:value="60579.631714462" calcext:value-type="float">
            <text:p><text:s/>60,579.63 </text:p>
          </table:table-cell>
          <table:table-cell table:style-name="ce754" table:formula="of:=[.X5]+[.X9]" office:value-type="float" office:value="182479.044508577" calcext:value-type="float">
            <text:p><text:s/>182,479.04 </text:p>
          </table:table-cell>
          <table:table-cell table:number-columns-repeated="2"/>
          <table:table-cell table:style-name="ce724" office:value-type="string" calcext:value-type="string">
            <text:p>FLUJO DE CAJA ECONÒMICO</text:p>
          </table:table-cell>
          <table:table-cell table:style-name="ce735" table:formula="of:=[.AB13]" office:value-type="float" office:value="-140058.565385523" calcext:value-type="float">
            <text:p><text:s/>(140,058.57)</text:p>
          </table:table-cell>
          <table:table-cell table:style-name="ce754" table:formula="of:=[.AC5]+[.AC9]" office:value-type="float" office:value="3970.35682133658" calcext:value-type="float">
            <text:p><text:s/>3,970.36 </text:p>
          </table:table-cell>
          <table:table-cell table:style-name="ce754" table:formula="of:=[.AD5]+[.AD9]" office:value-type="float" office:value="50711.7270466275" calcext:value-type="float">
            <text:p><text:s/>50,711.73 </text:p>
          </table:table-cell>
          <table:table-cell table:style-name="ce754" table:formula="of:=[.AE5]+[.AE9]" office:value-type="float" office:value="50515.6262592795" calcext:value-type="float">
            <text:p><text:s/>50,515.63 </text:p>
          </table:table-cell>
          <table:table-cell table:style-name="ce754" table:formula="of:=[.AF5]+[.AF9]" office:value-type="float" office:value="50280.305314462" calcext:value-type="float">
            <text:p><text:s/>50,280.31 </text:p>
          </table:table-cell>
          <table:table-cell table:style-name="ce754" table:formula="of:=[.AG5]+[.AG9]" office:value-type="float" office:value="172179.718108577" calcext:value-type="float">
            <text:p><text:s/>172,179.72 </text:p>
          </table:table-cell>
          <table:table-cell table:number-columns-repeated="2"/>
          <table:table-cell table:style-name="ce724" office:value-type="string" calcext:value-type="string">
            <text:p>FLUJO DE CAJA ECONÒMICO</text:p>
          </table:table-cell>
          <table:table-cell table:style-name="ce735" table:formula="of:=[.AK13]" office:value-type="float" office:value="-140058.565385523" calcext:value-type="float">
            <text:p><text:s/>(140,058.57)</text:p>
          </table:table-cell>
          <table:table-cell table:style-name="ce754" table:formula="of:=[.AL5]+[.AL9]" office:value-type="float" office:value="1103.22284205929" calcext:value-type="float">
            <text:p><text:s/>1,103.22 </text:p>
          </table:table-cell>
          <table:table-cell table:style-name="ce754" table:formula="of:=[.AM5]+[.AM9]" office:value-type="float" office:value="40412.4006466275" calcext:value-type="float">
            <text:p><text:s/>40,412.40 </text:p>
          </table:table-cell>
          <table:table-cell table:style-name="ce754" table:formula="of:=[.AN5]+[.AN9]" office:value-type="float" office:value="40216.2998592796" calcext:value-type="float">
            <text:p><text:s/>40,216.30 </text:p>
          </table:table-cell>
          <table:table-cell table:style-name="ce754" table:formula="of:=[.AO5]+[.AO9]" office:value-type="float" office:value="39980.978914462" calcext:value-type="float">
            <text:p><text:s/>39,980.98 </text:p>
          </table:table-cell>
          <table:table-cell table:style-name="ce754" table:formula="of:=[.AP5]+[.AP9]" office:value-type="float" office:value="161880.391708577" calcext:value-type="float">
            <text:p><text:s/>161,880.39 </text:p>
          </table:table-cell>
          <table:table-cell table:number-columns-repeated="2"/>
          <table:table-cell table:style-name="ce724" office:value-type="string" calcext:value-type="string">
            <text:p>FLUJO DE CAJA ECONÒMICO</text:p>
          </table:table-cell>
          <table:table-cell table:style-name="ce735" table:formula="of:=[.AT13]" office:value-type="float" office:value="-140058.565385523" calcext:value-type="float">
            <text:p><text:s/>(140,058.57)</text:p>
          </table:table-cell>
          <table:table-cell table:style-name="ce754" table:formula="of:=[.AU5]+[.AU9]" office:value-type="float" office:value="-1763.911137218" calcext:value-type="float">
            <text:p><text:s/>(1,763.91)</text:p>
          </table:table-cell>
          <table:table-cell table:style-name="ce754" table:formula="of:=[.AV5]+[.AV9]" office:value-type="float" office:value="30113.0742466275" calcext:value-type="float">
            <text:p><text:s/>30,113.07 </text:p>
          </table:table-cell>
          <table:table-cell table:style-name="ce754" table:formula="of:=[.AW5]+[.AW9]" office:value-type="float" office:value="29916.9734592795" calcext:value-type="float">
            <text:p><text:s/>29,916.97 </text:p>
          </table:table-cell>
          <table:table-cell table:style-name="ce754" table:formula="of:=[.AX5]+[.AX9]" office:value-type="float" office:value="29681.652514462" calcext:value-type="float">
            <text:p><text:s/>29,681.65 </text:p>
          </table:table-cell>
          <table:table-cell table:style-name="ce754" table:formula="of:=[.AY5]+[.AY9]" office:value-type="float" office:value="151581.065308577" calcext:value-type="float">
            <text:p><text:s/>151,581.07 </text:p>
          </table:table-cell>
          <table:table-cell table:number-columns-repeated="2"/>
          <table:table-cell table:style-name="ce724" office:value-type="string" calcext:value-type="string">
            <text:p>FLUJO DE CAJA ECONÒMICO</text:p>
          </table:table-cell>
          <table:table-cell table:style-name="ce735" table:formula="of:=[.BC13]" office:value-type="float" office:value="-140058.565385523" calcext:value-type="float">
            <text:p><text:s/>(140,058.57)</text:p>
          </table:table-cell>
          <table:table-cell table:style-name="ce754" table:formula="of:=[.BD5]+[.BD9]" office:value-type="float" office:value="5117.2104130475" calcext:value-type="float">
            <text:p><text:s/>5,117.21 </text:p>
          </table:table-cell>
          <table:table-cell table:style-name="ce754" table:formula="of:=[.BE5]+[.BE9]" office:value-type="float" office:value="54831.4576066275" calcext:value-type="float">
            <text:p><text:s/>54,831.46 </text:p>
          </table:table-cell>
          <table:table-cell table:style-name="ce754" table:formula="of:=[.BF5]+[.BF9]" office:value-type="float" office:value="54635.3568192796" calcext:value-type="float">
            <text:p><text:s/>54,635.36 </text:p>
          </table:table-cell>
          <table:table-cell table:style-name="ce754" table:formula="of:=[.BG5]+[.BG9]" office:value-type="float" office:value="54400.035874462" calcext:value-type="float">
            <text:p><text:s/>54,400.04 </text:p>
          </table:table-cell>
          <table:table-cell table:style-name="ce754" table:formula="of:=[.BH5]+[.BH9]" office:value-type="float" office:value="176299.448668577" calcext:value-type="float">
            <text:p><text:s/>176,299.45 </text:p>
          </table:table-cell>
          <table:table-cell table:number-columns-repeated="2"/>
          <table:table-cell table:style-name="ce724" office:value-type="string" calcext:value-type="string">
            <text:p>FLUJO DE CAJA ECONÒMICO</text:p>
          </table:table-cell>
          <table:table-cell table:style-name="ce735" table:formula="of:=[.BL13]" office:value-type="float" office:value="-140058.565385523" calcext:value-type="float">
            <text:p><text:s/>(140,058.57)</text:p>
          </table:table-cell>
          <table:table-cell table:style-name="ce754" table:formula="of:=[.BM5]+[.BM9]" office:value-type="float" office:value="2250.07643377022" calcext:value-type="float">
            <text:p><text:s/>2,250.08 </text:p>
          </table:table-cell>
          <table:table-cell table:style-name="ce754" table:formula="of:=[.BN5]+[.BN9]" office:value-type="float" office:value="44532.1312066275" calcext:value-type="float">
            <text:p><text:s/>44,532.13 </text:p>
          </table:table-cell>
          <table:table-cell table:style-name="ce754" table:formula="of:=[.BO5]+[.BO9]" office:value-type="float" office:value="44336.0304192796" calcext:value-type="float">
            <text:p><text:s/>44,336.03 </text:p>
          </table:table-cell>
          <table:table-cell table:style-name="ce754" table:formula="of:=[.BP5]+[.BP9]" office:value-type="float" office:value="44100.7094744621" calcext:value-type="float">
            <text:p><text:s/>44,100.71 </text:p>
          </table:table-cell>
          <table:table-cell table:style-name="ce754" table:formula="of:=[.BQ5]+[.BQ9]" office:value-type="float" office:value="166000.122268577" calcext:value-type="float">
            <text:p><text:s/>166,000.12 </text:p>
          </table:table-cell>
          <table:table-cell table:number-columns-repeated="2"/>
          <table:table-cell table:style-name="ce724" office:value-type="string" calcext:value-type="string">
            <text:p>FLUJO DE CAJA ECONÒMICO</text:p>
          </table:table-cell>
          <table:table-cell table:style-name="ce735" table:formula="of:=[.BU13]" office:value-type="float" office:value="-140058.565385523" calcext:value-type="float">
            <text:p><text:s/>(140,058.57)</text:p>
          </table:table-cell>
          <table:table-cell table:style-name="ce754" table:formula="of:=[.BV5]+[.BV9]" office:value-type="float" office:value="-2337.33793307345" calcext:value-type="float">
            <text:p><text:s/>(2,337.34)</text:p>
          </table:table-cell>
          <table:table-cell table:style-name="ce754" table:formula="of:=[.BW5]+[.BW9]" office:value-type="float" office:value="28053.2089666275" calcext:value-type="float">
            <text:p><text:s/>28,053.21 </text:p>
          </table:table-cell>
          <table:table-cell table:style-name="ce754" table:formula="of:=[.BX5]+[.BX9]" office:value-type="float" office:value="27857.1081792795" calcext:value-type="float">
            <text:p><text:s/>27,857.11 </text:p>
          </table:table-cell>
          <table:table-cell table:style-name="ce754" table:formula="of:=[.BY5]+[.BY9]" office:value-type="float" office:value="27621.787234462" calcext:value-type="float">
            <text:p><text:s/>27,621.79 </text:p>
          </table:table-cell>
          <table:table-cell table:style-name="ce754" table:formula="of:=[.BZ5]+[.BZ9]" office:value-type="float" office:value="149521.200028577" calcext:value-type="float">
            <text:p><text:s/>149,521.20 </text:p>
          </table:table-cell>
          <table:table-cell table:number-columns-repeated="16306"/>
        </table:table-row>
        <table:table-row table:style-name="ro1">
          <table:table-cell table:style-name="ce781" office:value-type="float" office:value="3" calcext:value-type="float">
            <text:p>3</text:p>
          </table:table-cell>
          <table:table-cell table:style-name="ce789" table:formula="of:=+[.AE19]" office:value-type="float" office:value="50515.6262592795" calcext:value-type="float">
            <text:p><text:s/>50,515.63 </text:p>
          </table:table-cell>
          <table:table-cell table:style-name="ce792" table:formula="of:=1/(1+[.$B$1])^[.A20]" office:value-type="float" office:value="0.583481482734786" calcext:value-type="float">
            <text:p><text:s/>0.58 </text:p>
          </table:table-cell>
          <table:table-cell table:style-name="ce789" table:formula="of:=[.B20]*[.C20]" office:value-type="float" office:value="29474.9325110407" calcext:value-type="float">
            <text:p><text:s/>29,474.93 </text:p>
          </table:table-cell>
          <table:table-cell table:style-name="ce800"/>
          <table:table-cell table:style-name="ce802" office:value-type="string" calcext:value-type="string" table:number-columns-spanned="1" table:number-rows-spanned="3">
            <text:p>Caida del Precio</text:p>
          </table:table-cell>
          <table:table-cell table:style-name="ce808" table:formula="of:=-[.D48]" office:value-type="percentage" office:value="-0.03" calcext:value-type="percentage">
            <text:p>-3 %</text:p>
          </table:table-cell>
          <table:table-cell table:style-name="ce811" table:number-columns-repeated="2"/>
          <table:table-cell table:style-name="ce814" table:formula="of:=[.D56]" office:value-type="float" office:value="32735.0451122305" calcext:value-type="float">
            <text:p><text:s/>32,735.05 </text:p>
          </table:table-cell>
          <table:table-cell table:style-name="ce809" table:formula="of:=[.D57]" office:value-type="percentage" office:value="0.267265778146359" calcext:value-type="percentage">
            <text:p>27 %</text:p>
          </table:table-cell>
          <table:table-cell table:style-name="ce783"/>
          <table:table-cell table:style-name="ce224" table:formula="of:=+[.M8]" office:value-type="float" office:value="2023" calcext:value-type="float">
            <text:p>2023</text:p>
          </table:table-cell>
          <table:table-cell table:style-name="ce818" table:formula="of:=+[.N8]*[.$N$15]" office:value-type="float" office:value="10871.5112" calcext:value-type="float">
            <text:p>10871.51</text:p>
          </table:table-cell>
          <table:table-cell table:style-name="ce818" table:formula="of:=+[.O8]*[.$O$15]" office:value-type="float" office:value="18" calcext:value-type="float">
            <text:p>18.00</text:p>
          </table:table-cell>
          <table:table-cell table:style-name="ce818" table:formula="of:=[.N20]*[.O20]" office:value-type="float" office:value="195687.2016" calcext:value-type="float">
            <text:p>195687.20</text:p>
          </table:table-cell>
          <table:table-cell/>
          <table:table-cell table:style-name="ce395" office:value-type="string" calcext:value-type="string">
            <text:p>PRESTAMO</text:p>
          </table:table-cell>
          <table:table-cell table:style-name="ce732" table:formula="of:=+[$'FLUJO DE CAJA '.B24]" office:value-type="float" office:value="5000" calcext:value-type="float">
            <text:p><text:s/>5,000.00 </text:p>
          </table:table-cell>
          <table:table-cell table:style-name="ce521" table:number-columns-repeated="5"/>
          <table:table-cell table:number-columns-repeated="2"/>
          <table:table-cell table:style-name="ce395" office:value-type="string" calcext:value-type="string">
            <text:p>PRESTAMO</text:p>
          </table:table-cell>
          <table:table-cell table:style-name="ce732" table:formula="of:=+[.S20]" office:value-type="float" office:value="5000" calcext:value-type="float">
            <text:p><text:s/>5,000.00 </text:p>
          </table:table-cell>
          <table:table-cell table:style-name="ce521" table:number-columns-repeated="5"/>
          <table:table-cell table:number-columns-repeated="2"/>
          <table:table-cell table:style-name="ce395" office:value-type="string" calcext:value-type="string">
            <text:p>PRESTAMO</text:p>
          </table:table-cell>
          <table:table-cell table:style-name="ce732" table:formula="of:=+[.AB20]" office:value-type="float" office:value="5000" calcext:value-type="float">
            <text:p><text:s/>5,000.00 </text:p>
          </table:table-cell>
          <table:table-cell table:style-name="ce521" table:number-columns-repeated="5"/>
          <table:table-cell table:number-columns-repeated="2"/>
          <table:table-cell table:style-name="ce395" office:value-type="string" calcext:value-type="string">
            <text:p>PRESTAMO</text:p>
          </table:table-cell>
          <table:table-cell table:style-name="ce732" table:formula="of:=+[.AK20]" office:value-type="float" office:value="5000" calcext:value-type="float">
            <text:p><text:s/>5,000.00 </text:p>
          </table:table-cell>
          <table:table-cell table:style-name="ce521" table:number-columns-repeated="5"/>
          <table:table-cell table:number-columns-repeated="2"/>
          <table:table-cell table:style-name="ce395" office:value-type="string" calcext:value-type="string">
            <text:p>PRESTAMO</text:p>
          </table:table-cell>
          <table:table-cell table:style-name="ce732" table:formula="of:=+[.AT20]" office:value-type="float" office:value="5000" calcext:value-type="float">
            <text:p><text:s/>5,000.00 </text:p>
          </table:table-cell>
          <table:table-cell table:style-name="ce521" table:number-columns-repeated="5"/>
          <table:table-cell table:number-columns-repeated="2"/>
          <table:table-cell table:style-name="ce395" office:value-type="string" calcext:value-type="string">
            <text:p>PRESTAMO</text:p>
          </table:table-cell>
          <table:table-cell table:style-name="ce732" table:formula="of:=+[.BC20]" office:value-type="float" office:value="5000" calcext:value-type="float">
            <text:p><text:s/>5,000.00 </text:p>
          </table:table-cell>
          <table:table-cell table:style-name="ce521" table:number-columns-repeated="5"/>
          <table:table-cell table:number-columns-repeated="2"/>
          <table:table-cell table:style-name="ce395" office:value-type="string" calcext:value-type="string">
            <text:p>PRESTAMO</text:p>
          </table:table-cell>
          <table:table-cell table:style-name="ce732" table:formula="of:=+[.BL20]" office:value-type="float" office:value="5000" calcext:value-type="float">
            <text:p><text:s/>5,000.00 </text:p>
          </table:table-cell>
          <table:table-cell table:style-name="ce521" table:number-columns-repeated="5"/>
          <table:table-cell table:number-columns-repeated="16306"/>
        </table:table-row>
        <table:table-row table:style-name="ro1">
          <table:table-cell table:style-name="ce781" office:value-type="float" office:value="4" calcext:value-type="float">
            <text:p>4</text:p>
          </table:table-cell>
          <table:table-cell table:style-name="ce789" table:formula="of:=+[.AF19]" office:value-type="float" office:value="50280.305314462" calcext:value-type="float">
            <text:p><text:s/>50,280.31 </text:p>
          </table:table-cell>
          <table:table-cell table:style-name="ce792" table:formula="of:=1/(1+[.$B$1])^[.A21]" office:value-type="float" office:value="0.487569021127028" calcext:value-type="float">
            <text:p><text:s/>0.49 </text:p>
          </table:table-cell>
          <table:table-cell table:style-name="ce789" table:formula="of:=[.B21]*[.C21]" office:value-type="float" office:value="24515.1192441403" calcext:value-type="float">
            <text:p><text:s/>24,515.12 </text:p>
          </table:table-cell>
          <table:table-cell table:style-name="ce800"/>
          <table:covered-table-cell table:style-name="ce803"/>
          <table:table-cell table:style-name="ce809" table:formula="of:=-[.D59]" office:value-type="percentage" office:value="-0.08" calcext:value-type="percentage">
            <text:p>-8 %</text:p>
          </table:table-cell>
          <table:table-cell table:style-name="ce811" table:number-columns-repeated="2"/>
          <table:table-cell table:style-name="ce815" table:formula="of:=[.D67]" office:value-type="float" office:value="7920.30995418066" calcext:value-type="float">
            <text:p><text:s/>7,920.31 </text:p>
          </table:table-cell>
          <table:table-cell table:style-name="ce809" table:formula="of:=[.D68]" office:value-type="percentage" office:value="0.214107310099611" calcext:value-type="percentage">
            <text:p>21 %</text:p>
          </table:table-cell>
          <table:table-cell table:style-name="ce783"/>
          <table:table-cell table:style-name="ce224" table:formula="of:=+[.M9]" office:value-type="float" office:value="2024" calcext:value-type="float">
            <text:p>2024</text:p>
          </table:table-cell>
          <table:table-cell table:style-name="ce818" table:formula="of:=+[.N9]*[.$N$15]" office:value-type="float" office:value="10871.5112" calcext:value-type="float">
            <text:p>10871.51</text:p>
          </table:table-cell>
          <table:table-cell table:style-name="ce818" table:formula="of:=+[.O9]*[.$O$15]" office:value-type="float" office:value="18" calcext:value-type="float">
            <text:p>18.00</text:p>
          </table:table-cell>
          <table:table-cell table:style-name="ce818" table:formula="of:=[.N21]*[.O21]" office:value-type="float" office:value="195687.2016" calcext:value-type="float">
            <text:p>195687.20</text:p>
          </table:table-cell>
          <table:table-cell/>
          <table:table-cell table:style-name="ce395" office:value-type="string" calcext:value-type="string">
            <text:p>SERVICIO DE DEUDA</text:p>
          </table:table-cell>
          <table:table-cell table:style-name="ce732"/>
          <table:table-cell table:style-name="ce521" table:formula="of:=+[$'FLUJO DE CAJA '.C25]" office:value-type="float" office:value="-5388.86178313251" calcext:value-type="float">
            <text:p><text:s/>(5,388.86)</text:p>
          </table:table-cell>
          <table:table-cell table:style-name="ce521" table:formula="of:=+[$'FLUJO DE CAJA '.D25]" office:value-type="float" office:value="0" calcext:value-type="float">
            <text:p><text:s/>- <text:s text:c="2"/></text:p>
          </table:table-cell>
          <table:table-cell table:style-name="ce521" table:formula="of:=+[$'FLUJO DE CAJA '.E25]" office:value-type="float" office:value="0" calcext:value-type="float">
            <text:p><text:s/>- <text:s text:c="2"/></text:p>
          </table:table-cell>
          <table:table-cell table:style-name="ce521" table:number-columns-repeated="2"/>
          <table:table-cell table:number-columns-repeated="2"/>
          <table:table-cell table:style-name="ce395" office:value-type="string" calcext:value-type="string">
            <text:p>SERVICIO DE DEUDA</text:p>
          </table:table-cell>
          <table:table-cell table:style-name="ce732"/>
          <table:table-cell table:style-name="ce521" table:formula="of:=+[.T21]" office:value-type="float" office:value="-5388.86178313251" calcext:value-type="float">
            <text:p><text:s/>(5,388.86)</text:p>
          </table:table-cell>
          <table:table-cell table:style-name="ce521" table:formula="of:=+[.U21]" office:value-type="float" office:value="0" calcext:value-type="float">
            <text:p><text:s/>- <text:s text:c="2"/></text:p>
          </table:table-cell>
          <table:table-cell table:style-name="ce521" table:formula="of:=+[.V21]" office:value-type="float" office:value="0" calcext:value-type="float">
            <text:p><text:s/>- <text:s text:c="2"/></text:p>
          </table:table-cell>
          <table:table-cell table:style-name="ce521" table:number-columns-repeated="2"/>
          <table:table-cell table:number-columns-repeated="2"/>
          <table:table-cell table:style-name="ce395" office:value-type="string" calcext:value-type="string">
            <text:p>SERVICIO DE DEUDA</text:p>
          </table:table-cell>
          <table:table-cell table:style-name="ce732"/>
          <table:table-cell table:style-name="ce521" table:formula="of:=+[.AC21]" office:value-type="float" office:value="-5388.86178313251" calcext:value-type="float">
            <text:p><text:s/>(5,388.86)</text:p>
          </table:table-cell>
          <table:table-cell table:style-name="ce521" table:formula="of:=+[.AD21]" office:value-type="float" office:value="0" calcext:value-type="float">
            <text:p><text:s/>- <text:s text:c="2"/></text:p>
          </table:table-cell>
          <table:table-cell table:style-name="ce521" table:formula="of:=+[.AE21]" office:value-type="float" office:value="0" calcext:value-type="float">
            <text:p><text:s/>- <text:s text:c="2"/></text:p>
          </table:table-cell>
          <table:table-cell table:style-name="ce521" table:number-columns-repeated="2"/>
          <table:table-cell table:number-columns-repeated="2"/>
          <table:table-cell table:style-name="ce395" office:value-type="string" calcext:value-type="string">
            <text:p>SERVICIO DE DEUDA</text:p>
          </table:table-cell>
          <table:table-cell table:style-name="ce732"/>
          <table:table-cell table:style-name="ce521" table:formula="of:=+[.AL21]" office:value-type="float" office:value="-5388.86178313251" calcext:value-type="float">
            <text:p><text:s/>(5,388.86)</text:p>
          </table:table-cell>
          <table:table-cell table:style-name="ce521" table:formula="of:=+[.AM21]" office:value-type="float" office:value="0" calcext:value-type="float">
            <text:p><text:s/>- <text:s text:c="2"/></text:p>
          </table:table-cell>
          <table:table-cell table:style-name="ce521" table:formula="of:=+[.AN21]" office:value-type="float" office:value="0" calcext:value-type="float">
            <text:p><text:s/>- <text:s text:c="2"/></text:p>
          </table:table-cell>
          <table:table-cell table:style-name="ce521" table:number-columns-repeated="2"/>
          <table:table-cell table:number-columns-repeated="2"/>
          <table:table-cell table:style-name="ce395" office:value-type="string" calcext:value-type="string">
            <text:p>SERVICIO DE DEUDA</text:p>
          </table:table-cell>
          <table:table-cell table:style-name="ce732"/>
          <table:table-cell table:style-name="ce521" table:formula="of:=+[.AU21]" office:value-type="float" office:value="-5388.86178313251" calcext:value-type="float">
            <text:p><text:s/>(5,388.86)</text:p>
          </table:table-cell>
          <table:table-cell table:style-name="ce521" table:formula="of:=+[.AV21]" office:value-type="float" office:value="0" calcext:value-type="float">
            <text:p><text:s/>- <text:s text:c="2"/></text:p>
          </table:table-cell>
          <table:table-cell table:style-name="ce521" table:formula="of:=+[.AW21]" office:value-type="float" office:value="0" calcext:value-type="float">
            <text:p><text:s/>- <text:s text:c="2"/></text:p>
          </table:table-cell>
          <table:table-cell table:style-name="ce521" table:number-columns-repeated="2"/>
          <table:table-cell table:number-columns-repeated="2"/>
          <table:table-cell table:style-name="ce395" office:value-type="string" calcext:value-type="string">
            <text:p>SERVICIO DE DEUDA</text:p>
          </table:table-cell>
          <table:table-cell table:style-name="ce732"/>
          <table:table-cell table:style-name="ce521" table:formula="of:=+[.BD21]" office:value-type="float" office:value="-5388.86178313251" calcext:value-type="float">
            <text:p><text:s/>(5,388.86)</text:p>
          </table:table-cell>
          <table:table-cell table:style-name="ce521" table:formula="of:=+[.BE21]" office:value-type="float" office:value="0" calcext:value-type="float">
            <text:p><text:s/>- <text:s text:c="2"/></text:p>
          </table:table-cell>
          <table:table-cell table:style-name="ce521" table:formula="of:=+[.BF21]" office:value-type="float" office:value="0" calcext:value-type="float">
            <text:p><text:s/>- <text:s text:c="2"/></text:p>
          </table:table-cell>
          <table:table-cell table:style-name="ce521" table:number-columns-repeated="2"/>
          <table:table-cell table:number-columns-repeated="2"/>
          <table:table-cell table:style-name="ce395" office:value-type="string" calcext:value-type="string">
            <text:p>SERVICIO DE DEUDA</text:p>
          </table:table-cell>
          <table:table-cell table:style-name="ce732"/>
          <table:table-cell table:style-name="ce521" table:formula="of:=+[.BM21]" office:value-type="float" office:value="-5388.86178313251" calcext:value-type="float">
            <text:p><text:s/>(5,388.86)</text:p>
          </table:table-cell>
          <table:table-cell table:style-name="ce521" table:formula="of:=+[.BN21]" office:value-type="float" office:value="0" calcext:value-type="float">
            <text:p><text:s/>- <text:s text:c="2"/></text:p>
          </table:table-cell>
          <table:table-cell table:style-name="ce521" table:formula="of:=+[.BO21]" office:value-type="float" office:value="0" calcext:value-type="float">
            <text:p><text:s/>- <text:s text:c="2"/></text:p>
          </table:table-cell>
          <table:table-cell table:style-name="ce521" table:number-columns-repeated="2"/>
          <table:table-cell table:number-columns-repeated="16306"/>
        </table:table-row>
        <table:table-row table:style-name="ro1">
          <table:table-cell table:style-name="ce781" office:value-type="float" office:value="5" calcext:value-type="float">
            <text:p>5</text:p>
          </table:table-cell>
          <table:table-cell table:style-name="ce789" table:formula="of:=+[.AG19]" office:value-type="float" office:value="172179.718108577" calcext:value-type="float">
            <text:p><text:s/>172,179.72 </text:p>
          </table:table-cell>
          <table:table-cell table:style-name="ce792" table:formula="of:=1/(1+[.$B$1])^[.A22]" office:value-type="float" office:value="0.407422613051154" calcext:value-type="float">
            <text:p><text:s/>0.41 </text:p>
          </table:table-cell>
          <table:table-cell table:style-name="ce789" table:formula="of:=[.B22]*[.C22]" office:value-type="float" office:value="70149.9106662075" calcext:value-type="float">
            <text:p><text:s/>70,149.91 </text:p>
          </table:table-cell>
          <table:table-cell table:style-name="ce800"/>
          <table:covered-table-cell table:style-name="ce804"/>
          <table:table-cell table:style-name="ce808" table:formula="of:=-[.D70]" office:value-type="percentage" office:value="-0.16" calcext:value-type="percentage">
            <text:p>-16 %</text:p>
          </table:table-cell>
          <table:table-cell table:style-name="ce811" table:number-columns-repeated="2"/>
          <table:table-cell table:style-name="ce815" table:formula="of:=[.D78]" office:value-type="float" office:value="-31783.2662986993" calcext:value-type="float">
            <text:p><text:s/>(31,783.27)</text:p>
          </table:table-cell>
          <table:table-cell table:style-name="ce809" table:formula="of:=[.D79]" office:value-type="percentage" office:value="0.124638701388653" calcext:value-type="percentage">
            <text:p>12 %</text:p>
          </table:table-cell>
          <table:table-cell table:style-name="ce783"/>
          <table:table-cell table:style-name="ce224" table:formula="of:=+[.M10]" office:value-type="float" office:value="2025" calcext:value-type="float">
            <text:p>2025</text:p>
          </table:table-cell>
          <table:table-cell table:style-name="ce818" table:formula="of:=+[.N10]*[.$N$15]" office:value-type="float" office:value="10871.5112" calcext:value-type="float">
            <text:p>10871.51</text:p>
          </table:table-cell>
          <table:table-cell table:style-name="ce818" table:formula="of:=+[.O10]*[.$O$15]" office:value-type="float" office:value="18" calcext:value-type="float">
            <text:p>18.00</text:p>
          </table:table-cell>
          <table:table-cell table:style-name="ce818" table:formula="of:=[.N22]*[.O22]" office:value-type="float" office:value="195687.2016" calcext:value-type="float">
            <text:p>195687.20</text:p>
          </table:table-cell>
          <table:table-cell/>
          <table:table-cell table:style-name="ce395" office:value-type="string" calcext:value-type="string">
            <text:p>ESCUDO FISCAL</text:p>
          </table:table-cell>
          <table:table-cell table:style-name="ce732"/>
          <table:table-cell table:style-name="ce521" table:formula="of:=+[$'FLUJO DE CAJA '.C26]" office:value-type="float" office:value="116.658534939754" calcext:value-type="float">
            <text:p><text:s/>116.66 </text:p>
          </table:table-cell>
          <table:table-cell table:style-name="ce521" table:formula="of:=+[$'FLUJO DE CAJA '.D26]" office:value-type="float" office:value="0" calcext:value-type="float">
            <text:p><text:s/>- <text:s text:c="2"/></text:p>
          </table:table-cell>
          <table:table-cell table:style-name="ce521" table:formula="of:=+[$'FLUJO DE CAJA '.E26]" office:value-type="float" office:value="0" calcext:value-type="float">
            <text:p><text:s/>- <text:s text:c="2"/></text:p>
          </table:table-cell>
          <table:table-cell table:style-name="ce521" table:number-columns-repeated="2"/>
          <table:table-cell table:number-columns-repeated="2"/>
          <table:table-cell table:style-name="ce395" office:value-type="string" calcext:value-type="string">
            <text:p>ESCUDO FISCAL</text:p>
          </table:table-cell>
          <table:table-cell table:style-name="ce732"/>
          <table:table-cell table:style-name="ce521" table:formula="of:=+[.T22]" office:value-type="float" office:value="116.658534939754" calcext:value-type="float">
            <text:p><text:s/>116.66 </text:p>
          </table:table-cell>
          <table:table-cell table:style-name="ce521" table:formula="of:=+[.U22]" office:value-type="float" office:value="0" calcext:value-type="float">
            <text:p><text:s/>- <text:s text:c="2"/></text:p>
          </table:table-cell>
          <table:table-cell table:style-name="ce521" table:formula="of:=+[.V22]" office:value-type="float" office:value="0" calcext:value-type="float">
            <text:p><text:s/>- <text:s text:c="2"/></text:p>
          </table:table-cell>
          <table:table-cell table:style-name="ce521" table:number-columns-repeated="2"/>
          <table:table-cell table:number-columns-repeated="2"/>
          <table:table-cell table:style-name="ce395" office:value-type="string" calcext:value-type="string">
            <text:p>ESCUDO FISCAL</text:p>
          </table:table-cell>
          <table:table-cell table:style-name="ce732"/>
          <table:table-cell table:style-name="ce521" table:formula="of:=+[.AC22]" office:value-type="float" office:value="116.658534939754" calcext:value-type="float">
            <text:p><text:s/>116.66 </text:p>
          </table:table-cell>
          <table:table-cell table:style-name="ce521" table:formula="of:=+[.AD22]" office:value-type="float" office:value="0" calcext:value-type="float">
            <text:p><text:s/>- <text:s text:c="2"/></text:p>
          </table:table-cell>
          <table:table-cell table:style-name="ce521" table:formula="of:=+[.AE22]" office:value-type="float" office:value="0" calcext:value-type="float">
            <text:p><text:s/>- <text:s text:c="2"/></text:p>
          </table:table-cell>
          <table:table-cell table:style-name="ce521" table:number-columns-repeated="2"/>
          <table:table-cell table:number-columns-repeated="2"/>
          <table:table-cell table:style-name="ce395" office:value-type="string" calcext:value-type="string">
            <text:p>ESCUDO FISCAL</text:p>
          </table:table-cell>
          <table:table-cell table:style-name="ce732"/>
          <table:table-cell table:style-name="ce521" table:formula="of:=+[.AL22]" office:value-type="float" office:value="116.658534939754" calcext:value-type="float">
            <text:p><text:s/>116.66 </text:p>
          </table:table-cell>
          <table:table-cell table:style-name="ce521" table:formula="of:=+[.AM22]" office:value-type="float" office:value="0" calcext:value-type="float">
            <text:p><text:s/>- <text:s text:c="2"/></text:p>
          </table:table-cell>
          <table:table-cell table:style-name="ce521" table:formula="of:=+[.AN22]" office:value-type="float" office:value="0" calcext:value-type="float">
            <text:p><text:s/>- <text:s text:c="2"/></text:p>
          </table:table-cell>
          <table:table-cell table:style-name="ce521" table:number-columns-repeated="2"/>
          <table:table-cell table:number-columns-repeated="2"/>
          <table:table-cell table:style-name="ce395" office:value-type="string" calcext:value-type="string">
            <text:p>ESCUDO FISCAL</text:p>
          </table:table-cell>
          <table:table-cell table:style-name="ce732"/>
          <table:table-cell table:style-name="ce521" table:formula="of:=+[.AU22]" office:value-type="float" office:value="116.658534939754" calcext:value-type="float">
            <text:p><text:s/>116.66 </text:p>
          </table:table-cell>
          <table:table-cell table:style-name="ce521" table:formula="of:=+[.AV22]" office:value-type="float" office:value="0" calcext:value-type="float">
            <text:p><text:s/>- <text:s text:c="2"/></text:p>
          </table:table-cell>
          <table:table-cell table:style-name="ce521" table:formula="of:=+[.AW22]" office:value-type="float" office:value="0" calcext:value-type="float">
            <text:p><text:s/>- <text:s text:c="2"/></text:p>
          </table:table-cell>
          <table:table-cell table:style-name="ce521" table:number-columns-repeated="2"/>
          <table:table-cell table:number-columns-repeated="2"/>
          <table:table-cell table:style-name="ce395" office:value-type="string" calcext:value-type="string">
            <text:p>ESCUDO FISCAL</text:p>
          </table:table-cell>
          <table:table-cell table:style-name="ce732"/>
          <table:table-cell table:style-name="ce521" table:formula="of:=+[.BD22]" office:value-type="float" office:value="116.658534939754" calcext:value-type="float">
            <text:p><text:s/>116.66 </text:p>
          </table:table-cell>
          <table:table-cell table:style-name="ce521" table:formula="of:=+[.BE22]" office:value-type="float" office:value="0" calcext:value-type="float">
            <text:p><text:s/>- <text:s text:c="2"/></text:p>
          </table:table-cell>
          <table:table-cell table:style-name="ce521" table:formula="of:=+[.BF22]" office:value-type="float" office:value="0" calcext:value-type="float">
            <text:p><text:s/>- <text:s text:c="2"/></text:p>
          </table:table-cell>
          <table:table-cell table:style-name="ce521" table:number-columns-repeated="2"/>
          <table:table-cell table:number-columns-repeated="2"/>
          <table:table-cell table:style-name="ce395" office:value-type="string" calcext:value-type="string">
            <text:p>ESCUDO FISCAL</text:p>
          </table:table-cell>
          <table:table-cell table:style-name="ce732"/>
          <table:table-cell table:style-name="ce521" table:formula="of:=+[.BM22]" office:value-type="float" office:value="116.658534939754" calcext:value-type="float">
            <text:p><text:s/>116.66 </text:p>
          </table:table-cell>
          <table:table-cell table:style-name="ce521" table:formula="of:=+[.BN22]" office:value-type="float" office:value="0" calcext:value-type="float">
            <text:p><text:s/>- <text:s text:c="2"/></text:p>
          </table:table-cell>
          <table:table-cell table:style-name="ce521" table:formula="of:=+[.BO22]" office:value-type="float" office:value="0" calcext:value-type="float">
            <text:p><text:s/>- <text:s text:c="2"/></text:p>
          </table:table-cell>
          <table:table-cell table:style-name="ce521" table:number-columns-repeated="2"/>
          <table:table-cell table:number-columns-repeated="16306"/>
        </table:table-row>
        <table:table-row table:style-name="ro1">
          <table:table-cell table:style-name="ce782" office:value-type="string" calcext:value-type="string" table:number-columns-spanned="3" table:number-rows-spanned="1">
            <text:p>VANE</text:p>
          </table:table-cell>
          <table:covered-table-cell table:style-name="ce790"/>
          <table:covered-table-cell table:style-name="ce793"/>
          <table:table-cell table:style-name="ce794" table:formula="of:=SUM([.D17:.D22])" office:value-type="float" office:value="22809.1510490105" calcext:value-type="float">
            <text:p><text:s/>22,809.15 </text:p>
          </table:table-cell>
          <table:table-cell table:style-name="ce785"/>
          <table:table-cell table:number-columns-repeated="6"/>
          <table:table-cell table:style-name="ce783"/>
          <table:table-cell table:number-columns-repeated="5"/>
          <table:table-cell table:style-name="ce724" office:value-type="string" calcext:value-type="string">
            <text:p>FLUJO DE CAJA FINANCIERO</text:p>
          </table:table-cell>
          <table:table-cell table:style-name="ce735" table:formula="of:=SUM([.S19:.S22])" office:value-type="float" office:value="-135058.565385523" calcext:value-type="float">
            <text:p><text:s/>(135,058.57)</text:p>
          </table:table-cell>
          <table:table-cell table:style-name="ce754" table:formula="of:=SUM([.T19:.T22])" office:value-type="float" office:value="1565.28755242112" calcext:value-type="float">
            <text:p><text:s/>1,565.29 </text:p>
          </table:table-cell>
          <table:table-cell table:style-name="ce754" table:formula="of:=SUM([.U19:.U22])" office:value-type="float" office:value="61011.0534466275" calcext:value-type="float">
            <text:p><text:s/>61,011.05 </text:p>
          </table:table-cell>
          <table:table-cell table:style-name="ce754" table:formula="of:=SUM([.V19:.V22])" office:value-type="float" office:value="60814.9526592795" calcext:value-type="float">
            <text:p><text:s/>60,814.95 </text:p>
          </table:table-cell>
          <table:table-cell table:style-name="ce754" table:formula="of:=SUM([.W19:.W22])" office:value-type="float" office:value="60579.631714462" calcext:value-type="float">
            <text:p><text:s/>60,579.63 </text:p>
          </table:table-cell>
          <table:table-cell table:style-name="ce754" table:formula="of:=SUM([.X19:.X22])" office:value-type="float" office:value="182479.044508577" calcext:value-type="float">
            <text:p><text:s/>182,479.04 </text:p>
          </table:table-cell>
          <table:table-cell table:number-columns-repeated="2"/>
          <table:table-cell table:style-name="ce724" office:value-type="string" calcext:value-type="string">
            <text:p>FLUJO DE CAJA FINANCIERO</text:p>
          </table:table-cell>
          <table:table-cell table:style-name="ce735" table:formula="of:=SUM([.AB19:.AB22])" office:value-type="float" office:value="-135058.565385523" calcext:value-type="float">
            <text:p><text:s/>(135,058.57)</text:p>
          </table:table-cell>
          <table:table-cell table:style-name="ce754" table:formula="of:=SUM([.AC19:.AC22])" office:value-type="float" office:value="-1301.84642685618" calcext:value-type="float">
            <text:p><text:s/>(1,301.85)</text:p>
          </table:table-cell>
          <table:table-cell table:style-name="ce754" table:formula="of:=SUM([.AD19:.AD22])" office:value-type="float" office:value="50711.7270466275" calcext:value-type="float">
            <text:p><text:s/>50,711.73 </text:p>
          </table:table-cell>
          <table:table-cell table:style-name="ce754" table:formula="of:=SUM([.AE19:.AE22])" office:value-type="float" office:value="50515.6262592795" calcext:value-type="float">
            <text:p><text:s/>50,515.63 </text:p>
          </table:table-cell>
          <table:table-cell table:style-name="ce754" table:formula="of:=SUM([.AF19:.AF22])" office:value-type="float" office:value="50280.305314462" calcext:value-type="float">
            <text:p><text:s/>50,280.31 </text:p>
          </table:table-cell>
          <table:table-cell table:style-name="ce754" table:formula="of:=SUM([.AG19:.AG22])" office:value-type="float" office:value="172179.718108577" calcext:value-type="float">
            <text:p><text:s/>172,179.72 </text:p>
          </table:table-cell>
          <table:table-cell table:number-columns-repeated="2"/>
          <table:table-cell table:style-name="ce724" office:value-type="string" calcext:value-type="string">
            <text:p>FLUJO DE CAJA FINANCIERO</text:p>
          </table:table-cell>
          <table:table-cell table:style-name="ce735" table:formula="of:=SUM([.AK19:.AK22])" office:value-type="float" office:value="-135058.565385523" calcext:value-type="float">
            <text:p><text:s/>(135,058.57)</text:p>
          </table:table-cell>
          <table:table-cell table:style-name="ce754" table:formula="of:=SUM([.AL19:.AL22])" office:value-type="float" office:value="-4168.98040613346" calcext:value-type="float">
            <text:p><text:s/>(4,168.98)</text:p>
          </table:table-cell>
          <table:table-cell table:style-name="ce754" table:formula="of:=SUM([.AM19:.AM22])" office:value-type="float" office:value="40412.4006466275" calcext:value-type="float">
            <text:p><text:s/>40,412.40 </text:p>
          </table:table-cell>
          <table:table-cell table:style-name="ce754" table:formula="of:=SUM([.AN19:.AN22])" office:value-type="float" office:value="40216.2998592796" calcext:value-type="float">
            <text:p><text:s/>40,216.30 </text:p>
          </table:table-cell>
          <table:table-cell table:style-name="ce754" table:formula="of:=SUM([.AO19:.AO22])" office:value-type="float" office:value="39980.978914462" calcext:value-type="float">
            <text:p><text:s/>39,980.98 </text:p>
          </table:table-cell>
          <table:table-cell table:style-name="ce754" table:formula="of:=SUM([.AP19:.AP22])" office:value-type="float" office:value="161880.391708577" calcext:value-type="float">
            <text:p><text:s/>161,880.39 </text:p>
          </table:table-cell>
          <table:table-cell table:number-columns-repeated="2"/>
          <table:table-cell table:style-name="ce724" office:value-type="string" calcext:value-type="string">
            <text:p>FLUJO DE CAJA FINANCIERO</text:p>
          </table:table-cell>
          <table:table-cell table:style-name="ce735" table:formula="of:=SUM([.AT19:.AT22])" office:value-type="float" office:value="-135058.565385523" calcext:value-type="float">
            <text:p><text:s/>(135,058.57)</text:p>
          </table:table-cell>
          <table:table-cell table:style-name="ce754" table:formula="of:=SUM([.AU19:.AU22])" office:value-type="float" office:value="-7036.11438541075" calcext:value-type="float">
            <text:p><text:s/>(7,036.11)</text:p>
          </table:table-cell>
          <table:table-cell table:style-name="ce754" table:formula="of:=SUM([.AV19:.AV22])" office:value-type="float" office:value="30113.0742466275" calcext:value-type="float">
            <text:p><text:s/>30,113.07 </text:p>
          </table:table-cell>
          <table:table-cell table:style-name="ce754" table:formula="of:=SUM([.AW19:.AW22])" office:value-type="float" office:value="29916.9734592795" calcext:value-type="float">
            <text:p><text:s/>29,916.97 </text:p>
          </table:table-cell>
          <table:table-cell table:style-name="ce754" table:formula="of:=SUM([.AX19:.AX22])" office:value-type="float" office:value="29681.652514462" calcext:value-type="float">
            <text:p><text:s/>29,681.65 </text:p>
          </table:table-cell>
          <table:table-cell table:style-name="ce754" table:formula="of:=SUM([.AY19:.AY22])" office:value-type="float" office:value="151581.065308577" calcext:value-type="float">
            <text:p><text:s/>151,581.07 </text:p>
          </table:table-cell>
          <table:table-cell table:number-columns-repeated="2"/>
          <table:table-cell table:style-name="ce724" office:value-type="string" calcext:value-type="string">
            <text:p>FLUJO DE CAJA FINANCIERO</text:p>
          </table:table-cell>
          <table:table-cell table:style-name="ce735" table:formula="of:=SUM([.BC19:.BC22])" office:value-type="float" office:value="-135058.565385523" calcext:value-type="float">
            <text:p><text:s/>(135,058.57)</text:p>
          </table:table-cell>
          <table:table-cell table:style-name="ce754" table:formula="of:=SUM([.BD19:.BD22])" office:value-type="float" office:value="-154.992835145257" calcext:value-type="float">
            <text:p><text:s/>(154.99)</text:p>
          </table:table-cell>
          <table:table-cell table:style-name="ce754" table:formula="of:=SUM([.BE19:.BE22])" office:value-type="float" office:value="54831.4576066275" calcext:value-type="float">
            <text:p><text:s/>54,831.46 </text:p>
          </table:table-cell>
          <table:table-cell table:style-name="ce754" table:formula="of:=SUM([.BF19:.BF22])" office:value-type="float" office:value="54635.3568192796" calcext:value-type="float">
            <text:p><text:s/>54,635.36 </text:p>
          </table:table-cell>
          <table:table-cell table:style-name="ce754" table:formula="of:=SUM([.BG19:.BG22])" office:value-type="float" office:value="54400.035874462" calcext:value-type="float">
            <text:p><text:s/>54,400.04 </text:p>
          </table:table-cell>
          <table:table-cell table:style-name="ce754" table:formula="of:=SUM([.BH19:.BH22])" office:value-type="float" office:value="176299.448668577" calcext:value-type="float">
            <text:p><text:s/>176,299.45 </text:p>
          </table:table-cell>
          <table:table-cell table:number-columns-repeated="2"/>
          <table:table-cell table:style-name="ce724" office:value-type="string" calcext:value-type="string">
            <text:p>FLUJO DE CAJA FINANCIERO</text:p>
          </table:table-cell>
          <table:table-cell table:style-name="ce735" table:formula="of:=SUM([.BL19:.BL22])" office:value-type="float" office:value="-135058.565385523" calcext:value-type="float">
            <text:p><text:s/>(135,058.57)</text:p>
          </table:table-cell>
          <table:table-cell table:style-name="ce754" table:formula="of:=SUM([.BM19:.BM22])" office:value-type="float" office:value="-3022.12681442253" calcext:value-type="float">
            <text:p><text:s/>(3,022.13)</text:p>
          </table:table-cell>
          <table:table-cell table:style-name="ce754" table:formula="of:=SUM([.BN19:.BN22])" office:value-type="float" office:value="44532.1312066275" calcext:value-type="float">
            <text:p><text:s/>44,532.13 </text:p>
          </table:table-cell>
          <table:table-cell table:style-name="ce754" table:formula="of:=SUM([.BO19:.BO22])" office:value-type="float" office:value="44336.0304192796" calcext:value-type="float">
            <text:p><text:s/>44,336.03 </text:p>
          </table:table-cell>
          <table:table-cell table:style-name="ce754" table:formula="of:=SUM([.BP19:.BP22])" office:value-type="float" office:value="44100.7094744621" calcext:value-type="float">
            <text:p><text:s/>44,100.71 </text:p>
          </table:table-cell>
          <table:table-cell table:style-name="ce754" table:formula="of:=SUM([.BQ19:.BQ22])" office:value-type="float" office:value="166000.122268577" calcext:value-type="float">
            <text:p><text:s/>166,000.12 </text:p>
          </table:table-cell>
          <table:table-cell table:number-columns-repeated="2"/>
          <table:table-cell table:style-name="ce724" office:value-type="string" calcext:value-type="string">
            <text:p>FLUJO DE CAJA FINANCIERO</text:p>
          </table:table-cell>
          <table:table-cell table:style-name="ce735" table:formula="of:=SUM([.BU19:.BU22])" office:value-type="float" office:value="-135058.565385523" calcext:value-type="float">
            <text:p><text:s/>(135,058.57)</text:p>
          </table:table-cell>
          <table:table-cell table:style-name="ce754" table:formula="of:=SUM([.BV19:.BV22])" office:value-type="float" office:value="-7609.54118126621" calcext:value-type="float">
            <text:p><text:s/>(7,609.54)</text:p>
          </table:table-cell>
          <table:table-cell table:style-name="ce754" table:formula="of:=SUM([.BW19:.BW22])" office:value-type="float" office:value="28053.2089666275" calcext:value-type="float">
            <text:p><text:s/>28,053.21 </text:p>
          </table:table-cell>
          <table:table-cell table:style-name="ce754" table:formula="of:=SUM([.BX19:.BX22])" office:value-type="float" office:value="27857.1081792795" calcext:value-type="float">
            <text:p><text:s/>27,857.11 </text:p>
          </table:table-cell>
          <table:table-cell table:style-name="ce754" table:formula="of:=SUM([.BY19:.BY22])" office:value-type="float" office:value="27621.787234462" calcext:value-type="float">
            <text:p><text:s/>27,621.79 </text:p>
          </table:table-cell>
          <table:table-cell table:style-name="ce754" table:formula="of:=SUM([.BZ19:.BZ22])" office:value-type="float" office:value="149521.200028577" calcext:value-type="float">
            <text:p><text:s/>149,521.20 </text:p>
          </table:table-cell>
          <table:table-cell table:number-columns-repeated="16306"/>
        </table:table-row>
        <table:table-row table:style-name="ro17">
          <table:table-cell table:style-name="ce782" office:value-type="string" calcext:value-type="string" table:number-columns-spanned="3" table:number-rows-spanned="1">
            <text:p>TIRE</text:p>
          </table:table-cell>
          <table:covered-table-cell table:style-name="ce790"/>
          <table:covered-table-cell table:style-name="ce793"/>
          <table:table-cell table:style-name="ce795" table:formula="of:=IRR([.B17:.B22];[.B13])" office:value-type="percentage" office:value="0.246236029874088" calcext:value-type="percentage">
            <text:p>24.62 %</text:p>
          </table:table-cell>
          <table:table-cell table:style-name="ce785"/>
          <table:table-cell/>
          <table:table-cell table:style-name="ce783" table:number-columns-repeated="6"/>
          <table:table-cell table:number-columns-repeated="5"/>
          <table:table-cell table:style-name="ce509" office:value-type="string" calcext:value-type="string">
            <text:p>FUENTE: ELABORACION PROPIA</text:p>
          </table:table-cell>
          <table:table-cell table:style-name="ce736"/>
          <table:table-cell table:style-name="ce755" table:number-columns-repeated="5"/>
          <table:table-cell table:number-columns-repeated="2"/>
          <table:table-cell table:style-name="ce509" office:value-type="string" calcext:value-type="string">
            <text:p>FUENTE: ELABORACION PROPIA</text:p>
          </table:table-cell>
          <table:table-cell table:style-name="ce736"/>
          <table:table-cell table:style-name="ce755" table:number-columns-repeated="5"/>
          <table:table-cell table:number-columns-repeated="2"/>
          <table:table-cell table:style-name="ce509" office:value-type="string" calcext:value-type="string">
            <text:p>FUENTE: ELABORACION PROPIA</text:p>
          </table:table-cell>
          <table:table-cell table:style-name="ce736"/>
          <table:table-cell table:style-name="ce755" table:number-columns-repeated="5"/>
          <table:table-cell table:number-columns-repeated="2"/>
          <table:table-cell table:style-name="ce509" office:value-type="string" calcext:value-type="string">
            <text:p>FUENTE: ELABORACION PROPIA</text:p>
          </table:table-cell>
          <table:table-cell table:style-name="ce736"/>
          <table:table-cell table:style-name="ce755" table:number-columns-repeated="5"/>
          <table:table-cell table:number-columns-repeated="2"/>
          <table:table-cell table:style-name="ce509" office:value-type="string" calcext:value-type="string">
            <text:p>FUENTE: ELABORACION PROPIA</text:p>
          </table:table-cell>
          <table:table-cell table:style-name="ce736"/>
          <table:table-cell table:style-name="ce755" table:number-columns-repeated="5"/>
          <table:table-cell table:number-columns-repeated="2"/>
          <table:table-cell table:style-name="ce509" office:value-type="string" calcext:value-type="string">
            <text:p>FUENTE: ELABORACION PROPIA</text:p>
          </table:table-cell>
          <table:table-cell table:style-name="ce736"/>
          <table:table-cell table:style-name="ce755" table:number-columns-repeated="5"/>
          <table:table-cell table:number-columns-repeated="2"/>
          <table:table-cell table:style-name="ce509" office:value-type="string" calcext:value-type="string">
            <text:p>FUENTE: ELABORACION PROPIA</text:p>
          </table:table-cell>
          <table:table-cell table:style-name="ce736"/>
          <table:table-cell table:style-name="ce755" table:number-columns-repeated="5"/>
          <table:table-cell table:number-columns-repeated="16306"/>
        </table:table-row>
        <table:table-row table:style-name="ro44">
          <table:table-cell table:style-name="ce785" table:number-columns-repeated="3"/>
          <table:table-cell table:style-name="ce797"/>
          <table:table-cell table:style-name="ce785"/>
          <table:table-cell/>
          <table:table-cell table:style-name="ce783" table:number-columns-repeated="6"/>
          <table:table-cell table:number-columns-repeated="6"/>
          <table:table-cell table:style-name="ce728"/>
          <table:table-cell table:number-columns-repeated="8"/>
          <table:table-cell table:style-name="ce728"/>
          <table:table-cell table:number-columns-repeated="8"/>
          <table:table-cell table:style-name="ce728"/>
          <table:table-cell table:number-columns-repeated="8"/>
          <table:table-cell table:style-name="ce728"/>
          <table:table-cell table:number-columns-repeated="8"/>
          <table:table-cell table:style-name="ce728"/>
          <table:table-cell table:number-columns-repeated="8"/>
          <table:table-cell table:style-name="ce728"/>
          <table:table-cell table:number-columns-repeated="8"/>
          <table:table-cell table:style-name="ce728"/>
          <table:table-cell table:number-columns-repeated="16311"/>
        </table:table-row>
        <table:table-row table:style-name="ro14">
          <table:table-cell table:style-name="ce784" office:value-type="string" calcext:value-type="string" table:number-columns-spanned="3" table:number-rows-spanned="1">
            <text:p>Caida de la produccion en</text:p>
          </table:table-cell>
          <table:covered-table-cell table:number-columns-repeated="2" table:style-name="ce784"/>
          <table:table-cell table:style-name="ce796" office:value-type="percentage" office:value="0.1" calcext:value-type="percentage">
            <text:p>10 %</text:p>
          </table:table-cell>
          <table:table-cell table:style-name="ce785"/>
          <table:table-cell table:style-name="ce783" table:number-columns-repeated="7"/>
          <table:table-cell/>
          <table:table-cell table:style-name="ce819" table:formula="of:=+[.N3]-[.D26]" office:value-type="percentage" office:value="0.9" calcext:value-type="percentage">
            <text:p>90 %</text:p>
          </table:table-cell>
          <table:table-cell table:style-name="ce819" table:formula="of:=+[.O3]" office:value-type="percentage" office:value="1" calcext:value-type="percentage">
            <text:p>100 %</text:p>
          </table:table-cell>
          <table:table-cell table:number-columns-repeated="2"/>
          <table:table-cell table:style-name="ce523"/>
          <table:table-cell table:style-name="ce737"/>
          <table:table-cell table:style-name="ce756" table:number-columns-repeated="5"/>
          <table:table-cell table:number-columns-repeated="2"/>
          <table:table-cell table:style-name="ce523"/>
          <table:table-cell table:style-name="ce737"/>
          <table:table-cell table:style-name="ce756" table:number-columns-repeated="5"/>
          <table:table-cell table:number-columns-repeated="2"/>
          <table:table-cell table:style-name="ce523"/>
          <table:table-cell table:style-name="ce737"/>
          <table:table-cell table:style-name="ce756" table:number-columns-repeated="5"/>
          <table:table-cell table:number-columns-repeated="2"/>
          <table:table-cell table:style-name="ce523"/>
          <table:table-cell table:style-name="ce737"/>
          <table:table-cell table:style-name="ce756" table:number-columns-repeated="5"/>
          <table:table-cell table:number-columns-repeated="2"/>
          <table:table-cell table:style-name="ce523"/>
          <table:table-cell table:style-name="ce737"/>
          <table:table-cell table:style-name="ce756" table:number-columns-repeated="5"/>
          <table:table-cell table:number-columns-repeated="2"/>
          <table:table-cell table:style-name="ce523"/>
          <table:table-cell table:style-name="ce737"/>
          <table:table-cell table:style-name="ce756" table:number-columns-repeated="5"/>
          <table:table-cell table:number-columns-repeated="2"/>
          <table:table-cell table:style-name="ce523"/>
          <table:table-cell table:style-name="ce737"/>
          <table:table-cell table:style-name="ce756" table:number-columns-repeated="5"/>
          <table:table-cell table:number-columns-repeated="16306"/>
        </table:table-row>
        <table:table-row table:style-name="ro1">
          <table:table-cell table:style-name="ce537" office:value-type="string" calcext:value-type="string">
            <text:p>AÑO</text:p>
          </table:table-cell>
          <table:table-cell table:style-name="ce537" office:value-type="string" calcext:value-type="string">
            <text:p>FCE</text:p>
          </table:table-cell>
          <table:table-cell table:style-name="ce537" office:value-type="string" calcext:value-type="string">
            <text:p>FA</text:p>
          </table:table-cell>
          <table:table-cell table:style-name="ce537" office:value-type="string" calcext:value-type="string">
            <text:p>VAN</text:p>
          </table:table-cell>
          <table:table-cell table:style-name="ce785"/>
          <table:table-cell table:style-name="ce783" table:number-columns-repeated="7"/>
          <table:table-cell table:style-name="ce227" office:value-type="string" calcext:value-type="string" table:number-columns-spanned="1" table:number-rows-spanned="2">
            <text:p>Años</text:p>
          </table:table-cell>
          <table:table-cell table:style-name="ce227" office:value-type="string" calcext:value-type="string" table:number-columns-spanned="1" table:number-rows-spanned="2">
            <text:p>Produccion (UND.)</text:p>
          </table:table-cell>
          <table:table-cell table:style-name="ce227" office:value-type="string" calcext:value-type="string" table:number-columns-spanned="1" table:number-rows-spanned="2">
            <text:p>Precio por Und (S/.)</text:p>
          </table:table-cell>
          <table:table-cell table:style-name="ce227" office:value-type="string" calcext:value-type="string" table:number-columns-spanned="1" table:number-rows-spanned="2">
            <text:p>Ventas proyectadas (S/.)</text:p>
          </table:table-cell>
          <table:table-cell/>
          <table:table-cell table:style-name="ce395" office:value-type="string" calcext:value-type="string">
            <text:p>COK</text:p>
          </table:table-cell>
          <table:table-cell table:style-name="ce738" office:value-type="percentage" office:value="0.2" calcext:value-type="percentage">
            <text:p>20 %</text:p>
          </table:table-cell>
          <table:table-cell table:style-name="ce522" table:number-columns-repeated="5"/>
          <table:table-cell table:number-columns-repeated="2"/>
          <table:table-cell table:style-name="ce395" office:value-type="string" calcext:value-type="string">
            <text:p>COK</text:p>
          </table:table-cell>
          <table:table-cell table:style-name="ce738" office:value-type="percentage" office:value="0.2" calcext:value-type="percentage">
            <text:p>20 %</text:p>
          </table:table-cell>
          <table:table-cell table:style-name="ce522" table:number-columns-repeated="5"/>
          <table:table-cell table:number-columns-repeated="2"/>
          <table:table-cell table:style-name="ce395" office:value-type="string" calcext:value-type="string">
            <text:p>COK</text:p>
          </table:table-cell>
          <table:table-cell table:style-name="ce738" office:value-type="percentage" office:value="0.2" calcext:value-type="percentage">
            <text:p>20 %</text:p>
          </table:table-cell>
          <table:table-cell table:style-name="ce522" table:number-columns-repeated="5"/>
          <table:table-cell table:number-columns-repeated="2"/>
          <table:table-cell table:style-name="ce395" office:value-type="string" calcext:value-type="string">
            <text:p>COK</text:p>
          </table:table-cell>
          <table:table-cell table:style-name="ce738" office:value-type="percentage" office:value="0.2" calcext:value-type="percentage">
            <text:p>20 %</text:p>
          </table:table-cell>
          <table:table-cell table:style-name="ce522" table:number-columns-repeated="5"/>
          <table:table-cell table:number-columns-repeated="2"/>
          <table:table-cell table:style-name="ce395" office:value-type="string" calcext:value-type="string">
            <text:p>COK</text:p>
          </table:table-cell>
          <table:table-cell table:style-name="ce738" office:value-type="percentage" office:value="0.2" calcext:value-type="percentage">
            <text:p>20 %</text:p>
          </table:table-cell>
          <table:table-cell table:style-name="ce522" table:number-columns-repeated="5"/>
          <table:table-cell table:number-columns-repeated="2"/>
          <table:table-cell table:style-name="ce395" office:value-type="string" calcext:value-type="string">
            <text:p>COK</text:p>
          </table:table-cell>
          <table:table-cell table:style-name="ce738" office:value-type="percentage" office:value="0.2" calcext:value-type="percentage">
            <text:p>20 %</text:p>
          </table:table-cell>
          <table:table-cell table:style-name="ce522" table:number-columns-repeated="5"/>
          <table:table-cell table:number-columns-repeated="2"/>
          <table:table-cell table:style-name="ce395" office:value-type="string" calcext:value-type="string">
            <text:p>COK</text:p>
          </table:table-cell>
          <table:table-cell table:style-name="ce738" office:value-type="percentage" office:value="0.2" calcext:value-type="percentage">
            <text:p>20 %</text:p>
          </table:table-cell>
          <table:table-cell table:style-name="ce522" table:number-columns-repeated="5"/>
          <table:table-cell table:number-columns-repeated="16306"/>
        </table:table-row>
        <table:table-row table:style-name="ro1">
          <table:table-cell table:style-name="ce781" office:value-type="float" office:value="0" calcext:value-type="float">
            <text:p>0</text:p>
          </table:table-cell>
          <table:table-cell table:style-name="ce789" table:formula="of:=+[.AK19]" office:value-type="float" office:value="-140058.565385523" calcext:value-type="float">
            <text:p><text:s/>(140,058.57)</text:p>
          </table:table-cell>
          <table:table-cell table:style-name="ce792" table:formula="of:=1/(1+[.$B$1])^[.A28]" office:value-type="float" office:value="1" calcext:value-type="float">
            <text:p><text:s/>1.00 </text:p>
          </table:table-cell>
          <table:table-cell table:style-name="ce789" table:formula="of:=[.B28]*[.C28]" office:value-type="float" office:value="-140058.565385523" calcext:value-type="float">
            <text:p><text:s/>(140,058.57)</text:p>
          </table:table-cell>
          <table:table-cell table:style-name="ce785"/>
          <table:table-cell table:style-name="ce805"/>
          <table:table-cell table:style-name="ce783" table:number-columns-repeated="6"/>
          <table:covered-table-cell table:number-columns-repeated="4" table:style-name="ce227"/>
          <table:table-cell/>
          <table:table-cell table:style-name="ce656" office:value-type="string" calcext:value-type="string">
            <text:p>TASA DE DESCUENTO</text:p>
          </table:table-cell>
          <table:table-cell table:style-name="ce739" table:formula="of:=+[$'FLUJO DE CAJA '.B32]" office:value-type="percentage" office:value="0.15" calcext:value-type="percentage">
            <text:p>15 %</text:p>
          </table:table-cell>
          <table:table-cell table:style-name="ce523"/>
          <table:table-cell table:style-name="ce656" office:value-type="string" calcext:value-type="string">
            <text:p>WACC</text:p>
          </table:table-cell>
          <table:table-cell table:style-name="ce762" table:formula="of:=+[$'FLUJO DE CAJA '.E32]" office:value-type="percentage" office:value="0.196715659633284" calcext:value-type="percentage">
            <text:p>19.67 %</text:p>
          </table:table-cell>
          <table:table-cell table:style-name="ce764"/>
          <table:table-cell table:style-name="ce523"/>
          <table:table-cell table:number-columns-repeated="2"/>
          <table:table-cell table:style-name="ce656" office:value-type="string" calcext:value-type="string">
            <text:p>TASA DE DESCUENTO</text:p>
          </table:table-cell>
          <table:table-cell table:style-name="ce739" table:formula="of:=+[.S28]" office:value-type="percentage" office:value="0.15" calcext:value-type="percentage">
            <text:p>15 %</text:p>
          </table:table-cell>
          <table:table-cell table:style-name="ce523"/>
          <table:table-cell table:style-name="ce656" office:value-type="string" calcext:value-type="string">
            <text:p>WACC</text:p>
          </table:table-cell>
          <table:table-cell table:style-name="ce762" table:formula="of:=+[.V28]" office:value-type="percentage" office:value="0.196715659633284" calcext:value-type="percentage">
            <text:p>19.67 %</text:p>
          </table:table-cell>
          <table:table-cell table:style-name="ce764"/>
          <table:table-cell table:style-name="ce523"/>
          <table:table-cell table:number-columns-repeated="2"/>
          <table:table-cell table:style-name="ce656" office:value-type="string" calcext:value-type="string">
            <text:p>TASA DE DESCUENTO</text:p>
          </table:table-cell>
          <table:table-cell table:style-name="ce739" table:formula="of:=+[.AB28]" office:value-type="percentage" office:value="0.15" calcext:value-type="percentage">
            <text:p>15 %</text:p>
          </table:table-cell>
          <table:table-cell table:style-name="ce523"/>
          <table:table-cell table:style-name="ce656" office:value-type="string" calcext:value-type="string">
            <text:p>WACC</text:p>
          </table:table-cell>
          <table:table-cell table:style-name="ce762" table:formula="of:=+[.AE28]" office:value-type="percentage" office:value="0.196715659633284" calcext:value-type="percentage">
            <text:p>19.67 %</text:p>
          </table:table-cell>
          <table:table-cell table:style-name="ce764"/>
          <table:table-cell table:style-name="ce523"/>
          <table:table-cell table:number-columns-repeated="2"/>
          <table:table-cell table:style-name="ce656" office:value-type="string" calcext:value-type="string">
            <text:p>TASA DE DESCUENTO</text:p>
          </table:table-cell>
          <table:table-cell table:style-name="ce739" table:formula="of:=+[.AK28]" office:value-type="percentage" office:value="0.15" calcext:value-type="percentage">
            <text:p>15 %</text:p>
          </table:table-cell>
          <table:table-cell table:style-name="ce523"/>
          <table:table-cell table:style-name="ce656" office:value-type="string" calcext:value-type="string">
            <text:p>WACC</text:p>
          </table:table-cell>
          <table:table-cell table:style-name="ce762" table:formula="of:=+[.AN28]" office:value-type="percentage" office:value="0.196715659633284" calcext:value-type="percentage">
            <text:p>19.67 %</text:p>
          </table:table-cell>
          <table:table-cell table:style-name="ce764"/>
          <table:table-cell table:style-name="ce523"/>
          <table:table-cell table:number-columns-repeated="2"/>
          <table:table-cell table:style-name="ce656" office:value-type="string" calcext:value-type="string">
            <text:p>TASA DE DESCUENTO</text:p>
          </table:table-cell>
          <table:table-cell table:style-name="ce739" table:formula="of:=+[.AT28]" office:value-type="percentage" office:value="0.15" calcext:value-type="percentage">
            <text:p>15 %</text:p>
          </table:table-cell>
          <table:table-cell table:style-name="ce523"/>
          <table:table-cell table:style-name="ce656" office:value-type="string" calcext:value-type="string">
            <text:p>WACC</text:p>
          </table:table-cell>
          <table:table-cell table:style-name="ce762" table:formula="of:=+[.AW28]" office:value-type="percentage" office:value="0.196715659633284" calcext:value-type="percentage">
            <text:p>19.67 %</text:p>
          </table:table-cell>
          <table:table-cell table:style-name="ce764"/>
          <table:table-cell table:style-name="ce523"/>
          <table:table-cell table:number-columns-repeated="2"/>
          <table:table-cell table:style-name="ce656" office:value-type="string" calcext:value-type="string">
            <text:p>TASA DE DESCUENTO</text:p>
          </table:table-cell>
          <table:table-cell table:style-name="ce739" table:formula="of:=+[.BC28]" office:value-type="percentage" office:value="0.15" calcext:value-type="percentage">
            <text:p>15 %</text:p>
          </table:table-cell>
          <table:table-cell table:style-name="ce523"/>
          <table:table-cell table:style-name="ce656" office:value-type="string" calcext:value-type="string">
            <text:p>WACC</text:p>
          </table:table-cell>
          <table:table-cell table:style-name="ce762" table:formula="of:=+[.BF28]" office:value-type="percentage" office:value="0.196715659633284" calcext:value-type="percentage">
            <text:p>19.67 %</text:p>
          </table:table-cell>
          <table:table-cell table:style-name="ce764"/>
          <table:table-cell table:style-name="ce523"/>
          <table:table-cell table:number-columns-repeated="2"/>
          <table:table-cell table:style-name="ce656" office:value-type="string" calcext:value-type="string">
            <text:p>TASA DE DESCUENTO</text:p>
          </table:table-cell>
          <table:table-cell table:style-name="ce739" table:formula="of:=+[.BL28]" office:value-type="percentage" office:value="0.15" calcext:value-type="percentage">
            <text:p>15 %</text:p>
          </table:table-cell>
          <table:table-cell table:style-name="ce523"/>
          <table:table-cell table:style-name="ce656" office:value-type="string" calcext:value-type="string">
            <text:p>WACC</text:p>
          </table:table-cell>
          <table:table-cell table:style-name="ce762" table:formula="of:=+[.BO28]" office:value-type="percentage" office:value="0.196715659633284" calcext:value-type="percentage">
            <text:p>19.67 %</text:p>
          </table:table-cell>
          <table:table-cell table:style-name="ce764"/>
          <table:table-cell table:style-name="ce523"/>
          <table:table-cell table:number-columns-repeated="16306"/>
        </table:table-row>
        <table:table-row table:style-name="ro1">
          <table:table-cell table:style-name="ce781" office:value-type="float" office:value="1" calcext:value-type="float">
            <text:p>1</text:p>
          </table:table-cell>
          <table:table-cell table:style-name="ce789" table:formula="of:=+[.AL19]" office:value-type="float" office:value="1103.22284205929" calcext:value-type="float">
            <text:p><text:s/>1,103.22 </text:p>
          </table:table-cell>
          <table:table-cell table:style-name="ce792" table:formula="of:=1/(1+[.$B$1])^[.A29]" office:value-type="float" office:value="0.835620384800877" calcext:value-type="float">
            <text:p><text:s/>0.84 </text:p>
          </table:table-cell>
          <table:table-cell table:style-name="ce789" table:formula="of:=[.B29]*[.C29]" office:value-type="float" office:value="921.875495802705" calcext:value-type="float">
            <text:p><text:s/>921.88 </text:p>
          </table:table-cell>
          <table:table-cell table:style-name="ce800"/>
          <table:table-cell table:style-name="ce783" table:number-columns-repeated="7"/>
          <table:table-cell table:style-name="ce224" table:formula="of:=+[.M18]" office:value-type="float" office:value="2021" calcext:value-type="float">
            <text:p>2021</text:p>
          </table:table-cell>
          <table:table-cell table:style-name="ce818" table:formula="of:=+[.N6]*[.$N$26]" office:value-type="float" office:value="2867.13397927729" calcext:value-type="float">
            <text:p>2867.13</text:p>
          </table:table-cell>
          <table:table-cell table:style-name="ce818" table:formula="of:=+[.O6]*[.$O$26]" office:value-type="float" office:value="18" calcext:value-type="float">
            <text:p>18.00</text:p>
          </table:table-cell>
          <table:table-cell table:style-name="ce818" table:formula="of:=[.N29]*[.O29]" office:value-type="float" office:value="51608.4116269912" calcext:value-type="float">
            <text:p>51608.41</text:p>
          </table:table-cell>
          <table:table-cell/>
          <table:table-cell table:style-name="ce523"/>
          <table:table-cell table:style-name="ce737"/>
          <table:table-cell table:style-name="ce523" table:number-columns-repeated="2"/>
          <table:table-cell/>
          <table:table-cell table:style-name="ce523" table:number-columns-repeated="2"/>
          <table:table-cell table:number-columns-repeated="2"/>
          <table:table-cell table:style-name="ce523"/>
          <table:table-cell table:style-name="ce737"/>
          <table:table-cell table:style-name="ce523" table:number-columns-repeated="2"/>
          <table:table-cell/>
          <table:table-cell table:style-name="ce523" table:number-columns-repeated="2"/>
          <table:table-cell table:number-columns-repeated="2"/>
          <table:table-cell table:style-name="ce523"/>
          <table:table-cell table:style-name="ce737"/>
          <table:table-cell table:style-name="ce523" table:number-columns-repeated="2"/>
          <table:table-cell/>
          <table:table-cell table:style-name="ce523" table:number-columns-repeated="2"/>
          <table:table-cell table:number-columns-repeated="2"/>
          <table:table-cell table:style-name="ce523"/>
          <table:table-cell table:style-name="ce737"/>
          <table:table-cell table:style-name="ce523" table:number-columns-repeated="2"/>
          <table:table-cell/>
          <table:table-cell table:style-name="ce523" table:number-columns-repeated="2"/>
          <table:table-cell table:number-columns-repeated="2"/>
          <table:table-cell table:style-name="ce523"/>
          <table:table-cell table:style-name="ce737"/>
          <table:table-cell table:style-name="ce523" table:number-columns-repeated="2"/>
          <table:table-cell/>
          <table:table-cell table:style-name="ce523" table:number-columns-repeated="2"/>
          <table:table-cell table:number-columns-repeated="2"/>
          <table:table-cell table:style-name="ce523"/>
          <table:table-cell table:style-name="ce737"/>
          <table:table-cell table:style-name="ce523" table:number-columns-repeated="2"/>
          <table:table-cell/>
          <table:table-cell table:style-name="ce523" table:number-columns-repeated="2"/>
          <table:table-cell table:number-columns-repeated="2"/>
          <table:table-cell table:style-name="ce523"/>
          <table:table-cell table:style-name="ce737"/>
          <table:table-cell table:style-name="ce523" table:number-columns-repeated="2"/>
          <table:table-cell/>
          <table:table-cell table:style-name="ce523" table:number-columns-repeated="2"/>
          <table:table-cell table:number-columns-repeated="16306"/>
        </table:table-row>
        <table:table-row table:style-name="ro1">
          <table:table-cell table:style-name="ce781" office:value-type="float" office:value="2" calcext:value-type="float">
            <text:p>2</text:p>
          </table:table-cell>
          <table:table-cell table:style-name="ce789" table:formula="of:=+[.AM19]" office:value-type="float" office:value="40412.4006466275" calcext:value-type="float">
            <text:p><text:s/>40,412.40 </text:p>
          </table:table-cell>
          <table:table-cell table:style-name="ce792" table:formula="of:=1/(1+[.$B$1])^[.A30]" office:value-type="float" office:value="0.698261427494766" calcext:value-type="float">
            <text:p><text:s/>0.70 </text:p>
          </table:table-cell>
          <table:table-cell table:style-name="ce789" table:formula="of:=[.B30]*[.C30]" office:value-type="float" office:value="28218.4205640045" calcext:value-type="float">
            <text:p><text:s/>28,218.42 </text:p>
          </table:table-cell>
          <table:table-cell table:style-name="ce800"/>
          <table:table-cell table:number-columns-repeated="7"/>
          <table:table-cell table:style-name="ce224" table:formula="of:=+[.M19]" office:value-type="float" office:value="2022" calcext:value-type="float">
            <text:p>2022</text:p>
          </table:table-cell>
          <table:table-cell table:style-name="ce818" table:formula="of:=+[.N7]*[.$N$26]" office:value-type="float" office:value="10299.3264" calcext:value-type="float">
            <text:p>10299.33</text:p>
          </table:table-cell>
          <table:table-cell table:style-name="ce818" table:formula="of:=+[.O7]*[.$O$26]" office:value-type="float" office:value="18" calcext:value-type="float">
            <text:p>18.00</text:p>
          </table:table-cell>
          <table:table-cell table:style-name="ce818" table:formula="of:=[.N30]*[.O30]" office:value-type="float" office:value="185387.8752" calcext:value-type="float">
            <text:p>185387.88</text:p>
          </table:table-cell>
          <table:table-cell/>
          <table:table-cell table:style-name="ce656" office:value-type="string" calcext:value-type="string">
            <text:p>VANE</text:p>
          </table:table-cell>
          <table:table-cell table:style-name="ce740" table:formula="of:=NPV([.V28];[.T19:.X19])+[.S19]" office:value-type="float" office:value="47623.8862070604" calcext:value-type="float">
            <text:p>S/. 47,623.89</text:p>
          </table:table-cell>
          <table:table-cell table:style-name="ce757"/>
          <table:table-cell table:style-name="ce761" table:number-columns-repeated="2"/>
          <table:table-cell table:style-name="ce765"/>
          <table:table-cell table:style-name="ce764"/>
          <table:table-cell table:number-columns-repeated="2"/>
          <table:table-cell table:style-name="ce656" office:value-type="string" calcext:value-type="string">
            <text:p>VANE</text:p>
          </table:table-cell>
          <table:table-cell table:style-name="ce740" table:formula="of:=NPV([.AE28];[.AC19:.AG19])+[.AB19]" office:value-type="float" office:value="22809.1510490105" calcext:value-type="float">
            <text:p>S/. 22,809.15</text:p>
          </table:table-cell>
          <table:table-cell table:style-name="ce757"/>
          <table:table-cell table:style-name="ce761" table:number-columns-repeated="2"/>
          <table:table-cell table:style-name="ce765"/>
          <table:table-cell table:style-name="ce764"/>
          <table:table-cell table:number-columns-repeated="2"/>
          <table:table-cell table:style-name="ce656" office:value-type="string" calcext:value-type="string">
            <text:p>VANE</text:p>
          </table:table-cell>
          <table:table-cell table:style-name="ce740" table:formula="of:=NPV([.AN28];[.AL19:.AP19])+[.AK19]" office:value-type="float" office:value="-2005.58410903934" calcext:value-type="float">
            <text:p>-S/. 2,005.58</text:p>
          </table:table-cell>
          <table:table-cell table:style-name="ce757"/>
          <table:table-cell table:style-name="ce761" table:number-columns-repeated="2"/>
          <table:table-cell table:style-name="ce765"/>
          <table:table-cell table:style-name="ce764"/>
          <table:table-cell table:number-columns-repeated="2"/>
          <table:table-cell table:style-name="ce656" office:value-type="string" calcext:value-type="string">
            <text:p>VANE</text:p>
          </table:table-cell>
          <table:table-cell table:style-name="ce740" table:formula="of:=NPV([.AW28];[.AU19:.AY19])+[.AT19]" office:value-type="float" office:value="-26820.3192670893" calcext:value-type="float">
            <text:p>-S/. 26,820.32</text:p>
          </table:table-cell>
          <table:table-cell table:style-name="ce757"/>
          <table:table-cell table:style-name="ce761" table:number-columns-repeated="2"/>
          <table:table-cell table:style-name="ce765"/>
          <table:table-cell table:style-name="ce764"/>
          <table:table-cell table:number-columns-repeated="2"/>
          <table:table-cell table:style-name="ce656" office:value-type="string" calcext:value-type="string">
            <text:p>VANE</text:p>
          </table:table-cell>
          <table:table-cell table:style-name="ce740" table:formula="of:=NPV([.BF28];[.BD19:.BH19])+[.BC19]" office:value-type="float" office:value="32735.0451122305" calcext:value-type="float">
            <text:p>S/. 32,735.05</text:p>
          </table:table-cell>
          <table:table-cell table:style-name="ce757"/>
          <table:table-cell table:style-name="ce761" table:number-columns-repeated="2"/>
          <table:table-cell table:style-name="ce765"/>
          <table:table-cell table:style-name="ce764"/>
          <table:table-cell table:number-columns-repeated="2"/>
          <table:table-cell table:style-name="ce656" office:value-type="string" calcext:value-type="string">
            <text:p>VANE</text:p>
          </table:table-cell>
          <table:table-cell table:style-name="ce740" table:formula="of:=NPV([.BO28];[.BM19:.BQ19])+[.BL19]" office:value-type="float" office:value="7920.30995418067" calcext:value-type="float">
            <text:p>S/. 7,920.31</text:p>
          </table:table-cell>
          <table:table-cell table:style-name="ce757"/>
          <table:table-cell table:style-name="ce761" table:number-columns-repeated="2"/>
          <table:table-cell table:style-name="ce765"/>
          <table:table-cell table:style-name="ce764"/>
          <table:table-cell table:number-columns-repeated="2"/>
          <table:table-cell table:style-name="ce656" office:value-type="string" calcext:value-type="string">
            <text:p>VANE</text:p>
          </table:table-cell>
          <table:table-cell table:style-name="ce740" table:formula="of:=NPV([.BX28];[.BV19:.BZ19])+[.BU19]" office:value-type="float" office:value="-31783.2662986993" calcext:value-type="float">
            <text:p>-S/. 31,783.27</text:p>
          </table:table-cell>
          <table:table-cell table:style-name="ce757"/>
          <table:table-cell table:style-name="ce761" table:number-columns-repeated="2"/>
          <table:table-cell table:style-name="ce765"/>
          <table:table-cell table:style-name="ce764"/>
          <table:table-cell table:number-columns-repeated="16306"/>
        </table:table-row>
        <table:table-row table:style-name="ro1">
          <table:table-cell table:style-name="ce781" office:value-type="float" office:value="3" calcext:value-type="float">
            <text:p>3</text:p>
          </table:table-cell>
          <table:table-cell table:style-name="ce789" table:formula="of:=+[.AN19]" office:value-type="float" office:value="40216.2998592796" calcext:value-type="float">
            <text:p><text:s/>40,216.30 </text:p>
          </table:table-cell>
          <table:table-cell table:style-name="ce792" table:formula="of:=1/(1+[.$B$1])^[.A31]" office:value-type="float" office:value="0.583481482734786" calcext:value-type="float">
            <text:p><text:s/>0.58 </text:p>
          </table:table-cell>
          <table:table-cell table:style-name="ce789" table:formula="of:=[.B31]*[.C31]" office:value-type="float" office:value="23465.4662719992" calcext:value-type="float">
            <text:p><text:s/>23,465.47 </text:p>
          </table:table-cell>
          <table:table-cell table:style-name="ce800"/>
          <table:table-cell table:number-columns-repeated="7"/>
          <table:table-cell table:style-name="ce224" table:formula="of:=+[.M20]" office:value-type="float" office:value="2023" calcext:value-type="float">
            <text:p>2023</text:p>
          </table:table-cell>
          <table:table-cell table:style-name="ce818" table:formula="of:=+[.N8]*[.$N$26]" office:value-type="float" office:value="10299.3264" calcext:value-type="float">
            <text:p>10299.33</text:p>
          </table:table-cell>
          <table:table-cell table:style-name="ce818" table:formula="of:=+[.O8]*[.$O$26]" office:value-type="float" office:value="18" calcext:value-type="float">
            <text:p>18.00</text:p>
          </table:table-cell>
          <table:table-cell table:style-name="ce818" table:formula="of:=[.N31]*[.O31]" office:value-type="float" office:value="185387.8752" calcext:value-type="float">
            <text:p>185387.88</text:p>
          </table:table-cell>
          <table:table-cell/>
          <table:table-cell table:style-name="ce656" office:value-type="string" calcext:value-type="string">
            <text:p>VANF</text:p>
          </table:table-cell>
          <table:table-cell table:style-name="ce740" table:formula="of:=+[.S23]+NPV([.S27];[.T23:.X23])" office:value-type="float" office:value="46357.4160878271" calcext:value-type="float">
            <text:p>S/. 46,357.42</text:p>
          </table:table-cell>
          <table:table-cell table:style-name="ce757"/>
          <table:table-cell table:style-name="ce523" table:number-columns-repeated="4"/>
          <table:table-cell table:number-columns-repeated="2"/>
          <table:table-cell table:style-name="ce656" office:value-type="string" calcext:value-type="string">
            <text:p>VANF</text:p>
          </table:table-cell>
          <table:table-cell table:style-name="ce740" table:formula="of:=+[.AB23]+NPV([.AB27];[.AC23:.AG23])" office:value-type="float" office:value="21749.6192069478" calcext:value-type="float">
            <text:p>S/. 21,749.62</text:p>
          </table:table-cell>
          <table:table-cell table:style-name="ce757"/>
          <table:table-cell table:style-name="ce523" table:number-columns-repeated="4"/>
          <table:table-cell table:number-columns-repeated="2"/>
          <table:table-cell table:style-name="ce656" office:value-type="string" calcext:value-type="string">
            <text:p>VANF</text:p>
          </table:table-cell>
          <table:table-cell table:style-name="ce740" table:formula="of:=+[.AK23]+NPV([.AK27];[.AL23:.AP23])" office:value-type="float" office:value="-2858.17767393135" calcext:value-type="float">
            <text:p>-S/. 2,858.18</text:p>
          </table:table-cell>
          <table:table-cell table:style-name="ce757"/>
          <table:table-cell table:style-name="ce523" table:number-columns-repeated="4"/>
          <table:table-cell table:number-columns-repeated="2"/>
          <table:table-cell table:style-name="ce656" office:value-type="string" calcext:value-type="string">
            <text:p>VANF</text:p>
          </table:table-cell>
          <table:table-cell table:style-name="ce740" table:formula="of:=+[.AT23]+NPV([.AT27];[.AU23:.AY23])" office:value-type="float" office:value="-27465.9745548106" calcext:value-type="float">
            <text:p>-S/. 27,465.97</text:p>
          </table:table-cell>
          <table:table-cell table:style-name="ce757"/>
          <table:table-cell table:style-name="ce523" table:number-columns-repeated="4"/>
          <table:table-cell table:number-columns-repeated="2"/>
          <table:table-cell table:style-name="ce656" office:value-type="string" calcext:value-type="string">
            <text:p>VANF</text:p>
          </table:table-cell>
          <table:table-cell table:style-name="ce740" table:formula="of:=+[.BC23]+NPV([.BC27];[.BD23:.BH23])" office:value-type="float" office:value="31592.7379592995" calcext:value-type="float">
            <text:p>S/. 31,592.74</text:p>
          </table:table-cell>
          <table:table-cell table:style-name="ce757"/>
          <table:table-cell table:style-name="ce523" table:number-columns-repeated="4"/>
          <table:table-cell table:number-columns-repeated="2"/>
          <table:table-cell table:style-name="ce656" office:value-type="string" calcext:value-type="string">
            <text:p>VANF</text:p>
          </table:table-cell>
          <table:table-cell table:style-name="ce740" table:formula="of:=+[.BL23]+NPV([.BL27];[.BM23:.BQ23])" office:value-type="float" office:value="6984.94107842041" calcext:value-type="float">
            <text:p>S/. 6,984.94</text:p>
          </table:table-cell>
          <table:table-cell table:style-name="ce757"/>
          <table:table-cell table:style-name="ce523" table:number-columns-repeated="4"/>
          <table:table-cell table:number-columns-repeated="2"/>
          <table:table-cell table:style-name="ce656" office:value-type="string" calcext:value-type="string">
            <text:p>VANF</text:p>
          </table:table-cell>
          <table:table-cell table:style-name="ce740" table:formula="of:=+[.BU23]+NPV([.BU27];[.BV23:.BZ23])" office:value-type="float" office:value="-32387.5339309865" calcext:value-type="float">
            <text:p>-S/. 32,387.53</text:p>
          </table:table-cell>
          <table:table-cell table:style-name="ce757"/>
          <table:table-cell table:style-name="ce523" table:number-columns-repeated="4"/>
          <table:table-cell table:number-columns-repeated="16306"/>
        </table:table-row>
        <table:table-row table:style-name="ro1">
          <table:table-cell table:style-name="ce781" office:value-type="float" office:value="4" calcext:value-type="float">
            <text:p>4</text:p>
          </table:table-cell>
          <table:table-cell table:style-name="ce789" table:formula="of:=+[.AO19]" office:value-type="float" office:value="39980.978914462" calcext:value-type="float">
            <text:p><text:s/>39,980.98 </text:p>
          </table:table-cell>
          <table:table-cell table:style-name="ce792" table:formula="of:=1/(1+[.$B$1])^[.A32]" office:value-type="float" office:value="0.487569021127028" calcext:value-type="float">
            <text:p><text:s/>0.49 </text:p>
          </table:table-cell>
          <table:table-cell table:style-name="ce789" table:formula="of:=[.B32]*[.C32]" office:value-type="float" office:value="19493.4867530246" calcext:value-type="float">
            <text:p><text:s/>19,493.49 </text:p>
          </table:table-cell>
          <table:table-cell table:style-name="ce800"/>
          <table:table-cell table:number-columns-repeated="7"/>
          <table:table-cell table:style-name="ce224" table:formula="of:=+[.M21]" office:value-type="float" office:value="2024" calcext:value-type="float">
            <text:p>2024</text:p>
          </table:table-cell>
          <table:table-cell table:style-name="ce818" table:formula="of:=+[.N9]*[.$N$26]" office:value-type="float" office:value="10299.3264" calcext:value-type="float">
            <text:p>10299.33</text:p>
          </table:table-cell>
          <table:table-cell table:style-name="ce818" table:formula="of:=+[.O9]*[.$O$26]" office:value-type="float" office:value="18" calcext:value-type="float">
            <text:p>18.00</text:p>
          </table:table-cell>
          <table:table-cell table:style-name="ce818" table:formula="of:=[.N32]*[.O32]" office:value-type="float" office:value="185387.8752" calcext:value-type="float">
            <text:p>185387.88</text:p>
          </table:table-cell>
          <table:table-cell/>
          <table:table-cell table:style-name="ce656" office:value-type="string" calcext:value-type="string">
            <text:p>TIRE</text:p>
          </table:table-cell>
          <table:table-cell table:style-name="ce741" table:formula="of:=IRR([.S19:.X19])" office:value-type="percentage" office:value="0.298260504834705" calcext:value-type="percentage">
            <text:p>29.83 %</text:p>
          </table:table-cell>
          <table:table-cell table:style-name="ce523"/>
          <table:table-cell/>
          <table:table-cell table:style-name="ce763"/>
          <table:table-cell table:style-name="ce523" table:number-columns-repeated="2"/>
          <table:table-cell table:number-columns-repeated="2"/>
          <table:table-cell table:style-name="ce656" office:value-type="string" calcext:value-type="string">
            <text:p>TIRE</text:p>
          </table:table-cell>
          <table:table-cell table:style-name="ce741" table:formula="of:=IRR([.AB19:.AG19])" office:value-type="percentage" office:value="0.246236029874088" calcext:value-type="percentage">
            <text:p>24.62 %</text:p>
          </table:table-cell>
          <table:table-cell table:style-name="ce523"/>
          <table:table-cell/>
          <table:table-cell table:style-name="ce763"/>
          <table:table-cell table:style-name="ce523" table:number-columns-repeated="2"/>
          <table:table-cell table:number-columns-repeated="2"/>
          <table:table-cell table:style-name="ce656" office:value-type="string" calcext:value-type="string">
            <text:p>TIRE</text:p>
          </table:table-cell>
          <table:table-cell table:style-name="ce741" table:formula="of:=IRR([.AK19:.AP19])" office:value-type="percentage" office:value="0.192277345480693" calcext:value-type="percentage">
            <text:p>19.23 %</text:p>
          </table:table-cell>
          <table:table-cell table:style-name="ce523"/>
          <table:table-cell/>
          <table:table-cell table:style-name="ce763"/>
          <table:table-cell table:style-name="ce523" table:number-columns-repeated="2"/>
          <table:table-cell table:number-columns-repeated="2"/>
          <table:table-cell table:style-name="ce656" office:value-type="string" calcext:value-type="string">
            <text:p>TIRE</text:p>
          </table:table-cell>
          <table:table-cell table:style-name="ce741" table:formula="of:=IRR([.AT19:.AY19])" office:value-type="percentage" office:value="0.13614815818162" calcext:value-type="percentage">
            <text:p>13.61 %</text:p>
          </table:table-cell>
          <table:table-cell table:style-name="ce523"/>
          <table:table-cell/>
          <table:table-cell table:style-name="ce763"/>
          <table:table-cell table:style-name="ce523" table:number-columns-repeated="2"/>
          <table:table-cell table:number-columns-repeated="2"/>
          <table:table-cell table:style-name="ce656" office:value-type="string" calcext:value-type="string">
            <text:p>TIRE</text:p>
          </table:table-cell>
          <table:table-cell table:style-name="ce741" table:formula="of:=IRR([.BC19:.BH19])" office:value-type="percentage" office:value="0.267265778146359" calcext:value-type="percentage">
            <text:p>26.73 %</text:p>
          </table:table-cell>
          <table:table-cell table:style-name="ce523"/>
          <table:table-cell/>
          <table:table-cell table:style-name="ce763"/>
          <table:table-cell table:style-name="ce523" table:number-columns-repeated="2"/>
          <table:table-cell table:number-columns-repeated="2"/>
          <table:table-cell table:style-name="ce656" office:value-type="string" calcext:value-type="string">
            <text:p>TIRE</text:p>
          </table:table-cell>
          <table:table-cell table:style-name="ce741" table:formula="of:=IRR([.BL19:.BQ19])" office:value-type="percentage" office:value="0.214107310099611" calcext:value-type="percentage">
            <text:p>21.41 %</text:p>
          </table:table-cell>
          <table:table-cell table:style-name="ce523"/>
          <table:table-cell/>
          <table:table-cell table:style-name="ce763"/>
          <table:table-cell table:style-name="ce523" table:number-columns-repeated="2"/>
          <table:table-cell table:number-columns-repeated="2"/>
          <table:table-cell table:style-name="ce656" office:value-type="string" calcext:value-type="string">
            <text:p>TIRE</text:p>
          </table:table-cell>
          <table:table-cell table:style-name="ce741" table:formula="of:=IRR([.BU19:.BZ19])" office:value-type="percentage" office:value="0.124638701388653" calcext:value-type="percentage">
            <text:p>12.46 %</text:p>
          </table:table-cell>
          <table:table-cell table:style-name="ce523"/>
          <table:table-cell/>
          <table:table-cell table:style-name="ce763"/>
          <table:table-cell table:style-name="ce523" table:number-columns-repeated="2"/>
          <table:table-cell table:number-columns-repeated="16306"/>
        </table:table-row>
        <table:table-row table:style-name="ro1">
          <table:table-cell table:style-name="ce781" office:value-type="float" office:value="5" calcext:value-type="float">
            <text:p>5</text:p>
          </table:table-cell>
          <table:table-cell table:style-name="ce789" table:formula="of:=+[.AP19]" office:value-type="float" office:value="161880.391708577" calcext:value-type="float">
            <text:p><text:s/>161,880.39 </text:p>
          </table:table-cell>
          <table:table-cell table:style-name="ce792" table:formula="of:=1/(1+[.$B$1])^[.A33]" office:value-type="float" office:value="0.407422613051154" calcext:value-type="float">
            <text:p><text:s/>0.41 </text:p>
          </table:table-cell>
          <table:table-cell table:style-name="ce789" table:formula="of:=[.B33]*[.C33]" office:value-type="float" office:value="65953.7321916528" calcext:value-type="float">
            <text:p><text:s/>65,953.73 </text:p>
          </table:table-cell>
          <table:table-cell table:style-name="ce800"/>
          <table:table-cell table:number-columns-repeated="7"/>
          <table:table-cell table:style-name="ce224" table:formula="of:=+[.M22]" office:value-type="float" office:value="2025" calcext:value-type="float">
            <text:p>2025</text:p>
          </table:table-cell>
          <table:table-cell table:style-name="ce818" table:formula="of:=+[.N10]*[.$N$26]" office:value-type="float" office:value="10299.3264" calcext:value-type="float">
            <text:p>10299.33</text:p>
          </table:table-cell>
          <table:table-cell table:style-name="ce818" table:formula="of:=+[.O10]*[.$O$26]" office:value-type="float" office:value="18" calcext:value-type="float">
            <text:p>18.00</text:p>
          </table:table-cell>
          <table:table-cell table:style-name="ce818" table:formula="of:=[.N33]*[.O33]" office:value-type="float" office:value="185387.8752" calcext:value-type="float">
            <text:p>185387.88</text:p>
          </table:table-cell>
          <table:table-cell/>
          <table:table-cell table:style-name="ce656" office:value-type="string" calcext:value-type="string">
            <text:p>TIRF</text:p>
          </table:table-cell>
          <table:table-cell table:style-name="ce741" table:formula="of:=IRR([.S23:.X23])" office:value-type="percentage" office:value="0.300762260115737" calcext:value-type="percentage">
            <text:p>30.08 %</text:p>
          </table:table-cell>
          <table:table-cell table:style-name="ce523"/>
          <table:table-cell/>
          <table:table-cell table:style-name="ce523" table:number-columns-repeated="3"/>
          <table:table-cell table:number-columns-repeated="2"/>
          <table:table-cell table:style-name="ce656" office:value-type="string" calcext:value-type="string">
            <text:p>TIRF</text:p>
          </table:table-cell>
          <table:table-cell table:style-name="ce741" table:formula="of:=IRR([.AB23:.AG23])" office:value-type="percentage" office:value="0.248115143298459" calcext:value-type="percentage">
            <text:p>24.81 %</text:p>
          </table:table-cell>
          <table:table-cell table:style-name="ce523"/>
          <table:table-cell/>
          <table:table-cell table:style-name="ce523" table:number-columns-repeated="3"/>
          <table:table-cell table:number-columns-repeated="2"/>
          <table:table-cell table:style-name="ce656" office:value-type="string" calcext:value-type="string">
            <text:p>TIRF</text:p>
          </table:table-cell>
          <table:table-cell table:style-name="ce741" table:formula="of:=IRR([.AK23:.AP23])" office:value-type="percentage" office:value="0.193558098198445" calcext:value-type="percentage">
            <text:p>19.36 %</text:p>
          </table:table-cell>
          <table:table-cell table:style-name="ce523"/>
          <table:table-cell/>
          <table:table-cell table:style-name="ce523" table:number-columns-repeated="3"/>
          <table:table-cell table:number-columns-repeated="2"/>
          <table:table-cell table:style-name="ce656" office:value-type="string" calcext:value-type="string">
            <text:p>TIRF</text:p>
          </table:table-cell>
          <table:table-cell table:style-name="ce741" table:formula="of:=IRR([.AT23:.AY23])" office:value-type="percentage" office:value="0.136862031096158" calcext:value-type="percentage">
            <text:p>13.69 %</text:p>
          </table:table-cell>
          <table:table-cell table:style-name="ce523"/>
          <table:table-cell/>
          <table:table-cell table:style-name="ce523" table:number-columns-repeated="3"/>
          <table:table-cell table:number-columns-repeated="2"/>
          <table:table-cell table:style-name="ce656" office:value-type="string" calcext:value-type="string">
            <text:p>TIRF</text:p>
          </table:table-cell>
          <table:table-cell table:style-name="ce741" table:formula="of:=IRR([.BC23:.BH23])" office:value-type="percentage" office:value="0.269391373227102" calcext:value-type="percentage">
            <text:p>26.94 %</text:p>
          </table:table-cell>
          <table:table-cell table:style-name="ce523"/>
          <table:table-cell/>
          <table:table-cell table:style-name="ce523" table:number-columns-repeated="3"/>
          <table:table-cell table:number-columns-repeated="2"/>
          <table:table-cell table:style-name="ce656" office:value-type="string" calcext:value-type="string">
            <text:p>TIRF</text:p>
          </table:table-cell>
          <table:table-cell table:style-name="ce741" table:formula="of:=IRR([.BL23:.BQ23])" office:value-type="percentage" office:value="0.215624078070811" calcext:value-type="percentage">
            <text:p>21.56 %</text:p>
          </table:table-cell>
          <table:table-cell table:style-name="ce523"/>
          <table:table-cell/>
          <table:table-cell table:style-name="ce523" table:number-columns-repeated="3"/>
          <table:table-cell table:number-columns-repeated="2"/>
          <table:table-cell table:style-name="ce656" office:value-type="string" calcext:value-type="string">
            <text:p>TIRF</text:p>
          </table:table-cell>
          <table:table-cell table:style-name="ce741" table:formula="of:=IRR([.BU23:.BZ23])" office:value-type="percentage" office:value="0.125243766196878" calcext:value-type="percentage">
            <text:p>12.52 %</text:p>
          </table:table-cell>
          <table:table-cell table:style-name="ce523"/>
          <table:table-cell/>
          <table:table-cell table:style-name="ce523" table:number-columns-repeated="3"/>
          <table:table-cell table:number-columns-repeated="16306"/>
        </table:table-row>
        <table:table-row table:style-name="ro1">
          <table:table-cell table:style-name="ce782" office:value-type="string" calcext:value-type="string" table:number-columns-spanned="3" table:number-rows-spanned="1">
            <text:p>VANE</text:p>
          </table:table-cell>
          <table:covered-table-cell table:style-name="ce790"/>
          <table:covered-table-cell table:style-name="ce793"/>
          <table:table-cell table:style-name="ce794" table:formula="of:=SUM([.D28:.D33])" office:value-type="float" office:value="-2005.58410903935" calcext:value-type="float">
            <text:p><text:s/>(2,005.58)</text:p>
          </table:table-cell>
          <table:table-cell table:style-name="ce785"/>
          <table:table-cell table:number-columns-repeated="12"/>
          <table:table-cell table:style-name="ce523"/>
          <table:table-cell table:style-name="ce743"/>
          <table:table-cell table:style-name="ce523" table:number-columns-repeated="5"/>
          <table:table-cell table:number-columns-repeated="16360"/>
        </table:table-row>
        <table:table-row table:style-name="ro1">
          <table:table-cell table:style-name="ce782" office:value-type="string" calcext:value-type="string" table:number-columns-spanned="3" table:number-rows-spanned="1">
            <text:p>TIRE</text:p>
          </table:table-cell>
          <table:covered-table-cell table:style-name="ce790"/>
          <table:covered-table-cell table:style-name="ce793"/>
          <table:table-cell table:style-name="ce795" table:formula="of:=IRR([.B28:.B33];[.B24])" office:value-type="percentage" office:value="0.192277345480693" calcext:value-type="percentage">
            <text:p>19.23 %</text:p>
          </table:table-cell>
          <table:table-cell table:style-name="ce785"/>
          <table:table-cell table:number-columns-repeated="12"/>
          <table:table-cell table:style-name="ce821" table:number-columns-spanned="1" table:number-rows-spanned="2"/>
          <table:table-cell table:style-name="ce825" table:number-columns-spanned="6" table:number-rows-spanned="1"/>
          <table:covered-table-cell table:number-columns-repeated="5" table:style-name="ce825"/>
          <table:table-cell table:number-columns-repeated="16360"/>
        </table:table-row>
        <table:table-row table:style-name="ro1">
          <table:table-cell table:style-name="ce785"/>
          <table:table-cell table:style-name="ce791" table:number-columns-repeated="3"/>
          <table:table-cell table:style-name="ce785"/>
          <table:table-cell table:number-columns-repeated="12"/>
          <table:covered-table-cell table:style-name="ce821"/>
          <table:table-cell table:style-name="ce826"/>
          <table:table-cell table:style-name="ce825" table:number-columns-repeated="5"/>
          <table:table-cell table:number-columns-repeated="16360"/>
        </table:table-row>
        <table:table-row table:style-name="ro14">
          <table:table-cell table:style-name="ce784" office:value-type="string" calcext:value-type="string" table:number-columns-spanned="3" table:number-rows-spanned="1">
            <text:p>Caida de la produccion en</text:p>
          </table:table-cell>
          <table:covered-table-cell table:number-columns-repeated="2" table:style-name="ce784"/>
          <table:table-cell table:style-name="ce796" office:value-type="percentage" office:value="0.15" calcext:value-type="percentage">
            <text:p>15 %</text:p>
          </table:table-cell>
          <table:table-cell table:style-name="ce785"/>
          <table:table-cell table:number-columns-repeated="8"/>
          <table:table-cell table:style-name="ce819" table:formula="of:=+[.N3]-[.D37]" office:value-type="percentage" office:value="0.85" calcext:value-type="percentage">
            <text:p>85 %</text:p>
          </table:table-cell>
          <table:table-cell table:style-name="ce819" table:formula="of:=+[.O3]" office:value-type="percentage" office:value="1" calcext:value-type="percentage">
            <text:p>100 %</text:p>
          </table:table-cell>
          <table:table-cell table:number-columns-repeated="2"/>
          <table:table-cell table:style-name="ce726"/>
          <table:table-cell table:style-name="ce748"/>
          <table:table-cell table:style-name="ce522" table:number-columns-repeated="5"/>
          <table:table-cell table:number-columns-repeated="16360"/>
        </table:table-row>
        <table:table-row table:style-name="ro1">
          <table:table-cell table:style-name="ce537" office:value-type="string" calcext:value-type="string">
            <text:p>AÑO</text:p>
          </table:table-cell>
          <table:table-cell table:style-name="ce537" office:value-type="string" calcext:value-type="string">
            <text:p>FCE</text:p>
          </table:table-cell>
          <table:table-cell table:style-name="ce537" office:value-type="string" calcext:value-type="string">
            <text:p>FA</text:p>
          </table:table-cell>
          <table:table-cell table:style-name="ce537" office:value-type="string" calcext:value-type="string">
            <text:p>VAN</text:p>
          </table:table-cell>
          <table:table-cell table:style-name="ce785"/>
          <table:table-cell table:number-columns-repeated="7"/>
          <table:table-cell table:style-name="ce227" office:value-type="string" calcext:value-type="string" table:number-columns-spanned="1" table:number-rows-spanned="2">
            <text:p>Años</text:p>
          </table:table-cell>
          <table:table-cell table:style-name="ce227" office:value-type="string" calcext:value-type="string" table:number-columns-spanned="1" table:number-rows-spanned="2">
            <text:p>Produccion (UND.)</text:p>
          </table:table-cell>
          <table:table-cell table:style-name="ce227" office:value-type="string" calcext:value-type="string" table:number-columns-spanned="1" table:number-rows-spanned="2">
            <text:p>Precio por Und (S/.)</text:p>
          </table:table-cell>
          <table:table-cell table:style-name="ce227" office:value-type="string" calcext:value-type="string" table:number-columns-spanned="1" table:number-rows-spanned="2">
            <text:p>Ventas proyectadas (S/.)</text:p>
          </table:table-cell>
          <table:table-cell/>
          <table:table-cell table:style-name="ce523"/>
          <table:table-cell table:style-name="ce827"/>
          <table:table-cell table:style-name="ce522" table:number-columns-repeated="5"/>
          <table:table-cell table:number-columns-repeated="16360"/>
        </table:table-row>
        <table:table-row table:style-name="ro1">
          <table:table-cell table:style-name="ce781" office:value-type="float" office:value="0" calcext:value-type="float">
            <text:p>0</text:p>
          </table:table-cell>
          <table:table-cell table:style-name="ce789" table:formula="of:=+[.AT19]" office:value-type="float" office:value="-140058.565385523" calcext:value-type="float">
            <text:p><text:s/>(140,058.57)</text:p>
          </table:table-cell>
          <table:table-cell table:style-name="ce792" table:formula="of:=1/(1+[.$B$1])^[.A39]" office:value-type="float" office:value="1" calcext:value-type="float">
            <text:p><text:s/>1.00 </text:p>
          </table:table-cell>
          <table:table-cell table:style-name="ce789" table:formula="of:=[.B39]*[.C39]" office:value-type="float" office:value="-140058.565385523" calcext:value-type="float">
            <text:p><text:s/>(140,058.57)</text:p>
          </table:table-cell>
          <table:table-cell table:style-name="ce785"/>
          <table:table-cell table:number-columns-repeated="7"/>
          <table:covered-table-cell table:number-columns-repeated="4" table:style-name="ce227"/>
          <table:table-cell/>
          <table:table-cell table:style-name="ce726"/>
          <table:table-cell table:style-name="ce828"/>
          <table:table-cell table:style-name="ce833" table:number-columns-repeated="5"/>
          <table:table-cell table:number-columns-repeated="16360"/>
        </table:table-row>
        <table:table-row table:style-name="ro1">
          <table:table-cell table:style-name="ce781" office:value-type="float" office:value="1" calcext:value-type="float">
            <text:p>1</text:p>
          </table:table-cell>
          <table:table-cell table:style-name="ce789" table:formula="of:=+[.AU19]" office:value-type="float" office:value="-1763.911137218" calcext:value-type="float">
            <text:p><text:s/>(1,763.91)</text:p>
          </table:table-cell>
          <table:table-cell table:style-name="ce792" table:formula="of:=1/(1+[.$B$1])^[.A40]" office:value-type="float" office:value="0.835620384800877" calcext:value-type="float">
            <text:p><text:s/>0.84 </text:p>
          </table:table-cell>
          <table:table-cell table:style-name="ce789" table:formula="of:=[.B40]*[.C40]" office:value-type="float" office:value="-1473.96010323666" calcext:value-type="float">
            <text:p><text:s/>(1,473.96)</text:p>
          </table:table-cell>
          <table:table-cell table:style-name="ce785"/>
          <table:table-cell table:number-columns-repeated="7"/>
          <table:table-cell table:style-name="ce224" table:formula="of:=+[.M29]" office:value-type="float" office:value="2021" calcext:value-type="float">
            <text:p>2021</text:p>
          </table:table-cell>
          <table:table-cell table:style-name="ce818" table:formula="of:=+[.N6]*[.$N$37]" office:value-type="float" office:value="2707.84875820633" calcext:value-type="float">
            <text:p>2707.85</text:p>
          </table:table-cell>
          <table:table-cell table:style-name="ce818" table:formula="of:=+[.O6]*[.$O$37]" office:value-type="float" office:value="18" calcext:value-type="float">
            <text:p>18.00</text:p>
          </table:table-cell>
          <table:table-cell table:style-name="ce818" table:formula="of:=[.N40]*[.O40]" office:value-type="float" office:value="48741.2776477139" calcext:value-type="float">
            <text:p>48741.28</text:p>
          </table:table-cell>
          <table:table-cell/>
          <table:table-cell table:style-name="ce726"/>
          <table:table-cell table:style-name="ce748"/>
          <table:table-cell table:style-name="ce522" table:number-columns-repeated="5"/>
          <table:table-cell table:number-columns-repeated="16360"/>
        </table:table-row>
        <table:table-row table:style-name="ro1">
          <table:table-cell table:style-name="ce781" office:value-type="float" office:value="2" calcext:value-type="float">
            <text:p>2</text:p>
          </table:table-cell>
          <table:table-cell table:style-name="ce789" table:formula="of:=+[.AV19]" office:value-type="float" office:value="30113.0742466275" calcext:value-type="float">
            <text:p><text:s/>30,113.07 </text:p>
          </table:table-cell>
          <table:table-cell table:style-name="ce792" table:formula="of:=1/(1+[.$B$1])^[.A41]" office:value-type="float" office:value="0.698261427494766" calcext:value-type="float">
            <text:p><text:s/>0.70 </text:p>
          </table:table-cell>
          <table:table-cell table:style-name="ce789" table:formula="of:=[.B41]*[.C41]" office:value-type="float" office:value="21026.798209706" calcext:value-type="float">
            <text:p><text:s/>21,026.80 </text:p>
          </table:table-cell>
          <table:table-cell table:style-name="ce785"/>
          <table:table-cell table:number-columns-repeated="7"/>
          <table:table-cell table:style-name="ce224" table:formula="of:=+[.M30]" office:value-type="float" office:value="2022" calcext:value-type="float">
            <text:p>2022</text:p>
          </table:table-cell>
          <table:table-cell table:style-name="ce818" table:formula="of:=+[.N7]*[.$N$37]" office:value-type="float" office:value="9727.1416" calcext:value-type="float">
            <text:p>9727.14</text:p>
          </table:table-cell>
          <table:table-cell table:style-name="ce818" table:formula="of:=+[.O7]*[.$O$37]" office:value-type="float" office:value="18" calcext:value-type="float">
            <text:p>18.00</text:p>
          </table:table-cell>
          <table:table-cell table:style-name="ce818" table:formula="of:=[.N41]*[.O41]" office:value-type="float" office:value="175088.5488" calcext:value-type="float">
            <text:p>175088.55</text:p>
          </table:table-cell>
          <table:table-cell/>
          <table:table-cell table:style-name="ce726"/>
          <table:table-cell table:style-name="ce748"/>
          <table:table-cell table:style-name="ce522" table:number-columns-repeated="5"/>
          <table:table-cell table:number-columns-repeated="16360"/>
        </table:table-row>
        <table:table-row table:style-name="ro1">
          <table:table-cell table:style-name="ce781" office:value-type="float" office:value="3" calcext:value-type="float">
            <text:p>3</text:p>
          </table:table-cell>
          <table:table-cell table:style-name="ce789" table:formula="of:=+[.AW19]" office:value-type="float" office:value="29916.9734592795" calcext:value-type="float">
            <text:p><text:s/>29,916.97 </text:p>
          </table:table-cell>
          <table:table-cell table:style-name="ce792" table:formula="of:=1/(1+[.$B$1])^[.A42]" office:value-type="float" office:value="0.583481482734786" calcext:value-type="float">
            <text:p><text:s/>0.58 </text:p>
          </table:table-cell>
          <table:table-cell table:style-name="ce789" table:formula="of:=[.B42]*[.C42]" office:value-type="float" office:value="17456.0000329577" calcext:value-type="float">
            <text:p><text:s/>17,456.00 </text:p>
          </table:table-cell>
          <table:table-cell table:style-name="ce785"/>
          <table:table-cell table:number-columns-repeated="7"/>
          <table:table-cell table:style-name="ce224" table:formula="of:=+[.M31]" office:value-type="float" office:value="2023" calcext:value-type="float">
            <text:p>2023</text:p>
          </table:table-cell>
          <table:table-cell table:style-name="ce818" table:formula="of:=+[.N8]*[.$N$37]" office:value-type="float" office:value="9727.1416" calcext:value-type="float">
            <text:p>9727.14</text:p>
          </table:table-cell>
          <table:table-cell table:style-name="ce818" table:formula="of:=+[.O8]*[.$O$37]" office:value-type="float" office:value="18" calcext:value-type="float">
            <text:p>18.00</text:p>
          </table:table-cell>
          <table:table-cell table:style-name="ce818" table:formula="of:=[.N42]*[.O42]" office:value-type="float" office:value="175088.5488" calcext:value-type="float">
            <text:p>175088.55</text:p>
          </table:table-cell>
          <table:table-cell/>
          <table:table-cell table:style-name="ce726"/>
          <table:table-cell table:style-name="ce827"/>
          <table:table-cell table:style-name="ce522" table:number-columns-repeated="5"/>
          <table:table-cell table:number-columns-repeated="16360"/>
        </table:table-row>
        <table:table-row table:style-name="ro1">
          <table:table-cell table:style-name="ce781" office:value-type="float" office:value="4" calcext:value-type="float">
            <text:p>4</text:p>
          </table:table-cell>
          <table:table-cell table:style-name="ce789" table:formula="of:=+[.AX19]" office:value-type="float" office:value="29681.652514462" calcext:value-type="float">
            <text:p><text:s/>29,681.65 </text:p>
          </table:table-cell>
          <table:table-cell table:style-name="ce792" table:formula="of:=1/(1+[.$B$1])^[.A43]" office:value-type="float" office:value="0.487569021127028" calcext:value-type="float">
            <text:p><text:s/>0.49 </text:p>
          </table:table-cell>
          <table:table-cell table:style-name="ce789" table:formula="of:=[.B43]*[.C43]" office:value-type="float" office:value="14471.8542619088" calcext:value-type="float">
            <text:p><text:s/>14,471.85 </text:p>
          </table:table-cell>
          <table:table-cell table:style-name="ce785"/>
          <table:table-cell table:number-columns-repeated="7"/>
          <table:table-cell table:style-name="ce224" table:formula="of:=+[.M32]" office:value-type="float" office:value="2024" calcext:value-type="float">
            <text:p>2024</text:p>
          </table:table-cell>
          <table:table-cell table:style-name="ce818" table:formula="of:=+[.N9]*[.$N$37]" office:value-type="float" office:value="9727.1416" calcext:value-type="float">
            <text:p>9727.14</text:p>
          </table:table-cell>
          <table:table-cell table:style-name="ce818" table:formula="of:=+[.O9]*[.$O$37]" office:value-type="float" office:value="18" calcext:value-type="float">
            <text:p>18.00</text:p>
          </table:table-cell>
          <table:table-cell table:style-name="ce818" table:formula="of:=[.N43]*[.O43]" office:value-type="float" office:value="175088.5488" calcext:value-type="float">
            <text:p>175088.55</text:p>
          </table:table-cell>
          <table:table-cell/>
          <table:table-cell table:style-name="ce523"/>
          <table:table-cell table:style-name="ce748"/>
          <table:table-cell table:style-name="ce760" table:number-columns-repeated="5"/>
          <table:table-cell table:number-columns-repeated="16360"/>
        </table:table-row>
        <table:table-row table:style-name="ro1">
          <table:table-cell table:style-name="ce781" office:value-type="float" office:value="5" calcext:value-type="float">
            <text:p>5</text:p>
          </table:table-cell>
          <table:table-cell table:style-name="ce789" table:formula="of:=+[.AY19]" office:value-type="float" office:value="151581.065308577" calcext:value-type="float">
            <text:p><text:s/>151,581.07 </text:p>
          </table:table-cell>
          <table:table-cell table:style-name="ce792" table:formula="of:=1/(1+[.$B$1])^[.A44]" office:value-type="float" office:value="0.407422613051154" calcext:value-type="float">
            <text:p><text:s/>0.41 </text:p>
          </table:table-cell>
          <table:table-cell table:style-name="ce789" table:formula="of:=[.B44]*[.C44]" office:value-type="float" office:value="61757.553717098" calcext:value-type="float">
            <text:p><text:s/>61,757.55 </text:p>
          </table:table-cell>
          <table:table-cell table:style-name="ce785"/>
          <table:table-cell table:number-columns-repeated="7"/>
          <table:table-cell table:style-name="ce224" table:formula="of:=+[.M33]" office:value-type="float" office:value="2025" calcext:value-type="float">
            <text:p>2025</text:p>
          </table:table-cell>
          <table:table-cell table:style-name="ce818" table:formula="of:=+[.N10]*[.$N$37]" office:value-type="float" office:value="9727.1416" calcext:value-type="float">
            <text:p>9727.14</text:p>
          </table:table-cell>
          <table:table-cell table:style-name="ce818" table:formula="of:=+[.O10]*[.$O$37]" office:value-type="float" office:value="18" calcext:value-type="float">
            <text:p>18.00</text:p>
          </table:table-cell>
          <table:table-cell table:style-name="ce818" table:formula="of:=[.N44]*[.O44]" office:value-type="float" office:value="175088.5488" calcext:value-type="float">
            <text:p>175088.55</text:p>
          </table:table-cell>
          <table:table-cell/>
          <table:table-cell table:style-name="ce822"/>
          <table:table-cell table:style-name="ce829"/>
          <table:table-cell table:style-name="ce663" table:number-columns-repeated="5"/>
          <table:table-cell table:number-columns-repeated="16360"/>
        </table:table-row>
        <table:table-row table:style-name="ro1">
          <table:table-cell table:style-name="ce782" office:value-type="string" calcext:value-type="string" table:number-columns-spanned="3" table:number-rows-spanned="1">
            <text:p>VANE</text:p>
          </table:table-cell>
          <table:covered-table-cell table:style-name="ce790"/>
          <table:covered-table-cell table:style-name="ce793"/>
          <table:table-cell table:style-name="ce794" table:formula="of:=SUM([.D39:.D44])" office:value-type="float" office:value="-26820.3192670893" calcext:value-type="float">
            <text:p><text:s/>(26,820.32)</text:p>
          </table:table-cell>
          <table:table-cell table:style-name="ce785"/>
          <table:table-cell table:number-columns-repeated="12"/>
          <table:table-cell table:style-name="ce727"/>
          <table:table-cell table:style-name="ce830"/>
          <table:table-cell table:style-name="ce663" table:number-columns-repeated="5"/>
          <table:table-cell table:number-columns-repeated="16360"/>
        </table:table-row>
        <table:table-row table:style-name="ro47">
          <table:table-cell table:style-name="ce782" office:value-type="string" calcext:value-type="string" table:number-columns-spanned="3" table:number-rows-spanned="1">
            <text:p>TIRE</text:p>
          </table:table-cell>
          <table:covered-table-cell table:style-name="ce790"/>
          <table:covered-table-cell table:style-name="ce793"/>
          <table:table-cell table:style-name="ce795" table:formula="of:=IRR([.B39:.B44];[.B35])" office:value-type="percentage" office:value="0.13614815818162" calcext:value-type="percentage">
            <text:p>13.61 %</text:p>
          </table:table-cell>
          <table:table-cell table:style-name="ce785"/>
          <table:table-cell table:number-columns-repeated="12"/>
          <table:table-cell table:style-name="ce823" table:number-columns-repeated="7"/>
          <table:table-cell table:number-columns-repeated="16360"/>
        </table:table-row>
        <table:table-row table:style-name="ro47">
          <table:table-cell table:style-name="ce785" table:number-columns-repeated="3"/>
          <table:table-cell table:style-name="ce797"/>
          <table:table-cell table:style-name="ce785"/>
          <table:table-cell table:number-columns-repeated="16379"/>
        </table:table-row>
        <table:table-row table:style-name="ro14">
          <table:table-cell table:style-name="ce786" office:value-type="string" calcext:value-type="string" table:number-columns-spanned="3" table:number-rows-spanned="1">
            <text:p>Caida del precio en</text:p>
          </table:table-cell>
          <table:covered-table-cell table:number-columns-repeated="2" table:style-name="ce786"/>
          <table:table-cell table:style-name="ce798" office:value-type="percentage" office:value="0.03" calcext:value-type="percentage">
            <text:p>3 %</text:p>
          </table:table-cell>
          <table:table-cell table:style-name="ce785"/>
          <table:table-cell table:number-columns-repeated="8"/>
          <table:table-cell table:style-name="ce819" table:formula="of:=+[.N3]" office:value-type="percentage" office:value="1" calcext:value-type="percentage">
            <text:p>100 %</text:p>
          </table:table-cell>
          <table:table-cell table:style-name="ce819" table:formula="of:=+[.O3]-[.D48]" office:value-type="percentage" office:value="0.97" calcext:value-type="percentage">
            <text:p>97 %</text:p>
          </table:table-cell>
          <table:table-cell table:number-columns-repeated="16369"/>
        </table:table-row>
        <table:table-row table:style-name="ro1">
          <table:table-cell table:style-name="ce537" office:value-type="string" calcext:value-type="string">
            <text:p>AÑO</text:p>
          </table:table-cell>
          <table:table-cell table:style-name="ce537" office:value-type="string" calcext:value-type="string">
            <text:p>FCE</text:p>
          </table:table-cell>
          <table:table-cell table:style-name="ce537" office:value-type="string" calcext:value-type="string">
            <text:p>FA</text:p>
          </table:table-cell>
          <table:table-cell table:style-name="ce537" office:value-type="string" calcext:value-type="string">
            <text:p>VAN</text:p>
          </table:table-cell>
          <table:table-cell table:style-name="ce785"/>
          <table:table-cell table:number-columns-repeated="7"/>
          <table:table-cell table:style-name="ce227" office:value-type="string" calcext:value-type="string" table:number-columns-spanned="1" table:number-rows-spanned="2">
            <text:p>Años</text:p>
          </table:table-cell>
          <table:table-cell table:style-name="ce227" office:value-type="string" calcext:value-type="string" table:number-columns-spanned="1" table:number-rows-spanned="2">
            <text:p>Produccion (UND.)</text:p>
          </table:table-cell>
          <table:table-cell table:style-name="ce227" office:value-type="string" calcext:value-type="string" table:number-columns-spanned="1" table:number-rows-spanned="2">
            <text:p>Precio por Und (S/.)</text:p>
          </table:table-cell>
          <table:table-cell table:style-name="ce227" office:value-type="string" calcext:value-type="string" table:number-columns-spanned="1" table:number-rows-spanned="2">
            <text:p>Ventas proyectadas (S/.)</text:p>
          </table:table-cell>
          <table:table-cell table:number-columns-repeated="16368"/>
        </table:table-row>
        <table:table-row table:style-name="ro1">
          <table:table-cell table:style-name="ce781" office:value-type="float" office:value="0" calcext:value-type="float">
            <text:p>0</text:p>
          </table:table-cell>
          <table:table-cell table:style-name="ce789" table:formula="of:=+[.BC19]" office:value-type="float" office:value="-140058.565385523" calcext:value-type="float">
            <text:p><text:s/>(140,058.57)</text:p>
          </table:table-cell>
          <table:table-cell table:style-name="ce792" table:formula="of:=1/(1+[.$B$1])^[.A50]" office:value-type="float" office:value="1" calcext:value-type="float">
            <text:p><text:s/>1.00 </text:p>
          </table:table-cell>
          <table:table-cell table:style-name="ce789" table:formula="of:=[.B50]*[.C50]" office:value-type="float" office:value="-140058.565385523" calcext:value-type="float">
            <text:p><text:s/>(140,058.57)</text:p>
          </table:table-cell>
          <table:table-cell table:style-name="ce785"/>
          <table:table-cell table:style-name="ce806"/>
          <table:table-cell table:number-columns-repeated="6"/>
          <table:covered-table-cell table:number-columns-repeated="4" table:style-name="ce227"/>
          <table:table-cell table:number-columns-repeated="16368"/>
        </table:table-row>
        <table:table-row table:style-name="ro1">
          <table:table-cell table:style-name="ce781" office:value-type="float" office:value="1" calcext:value-type="float">
            <text:p>1</text:p>
          </table:table-cell>
          <table:table-cell table:style-name="ce789" table:formula="of:=+[.BD19]" office:value-type="float" office:value="5117.2104130475" calcext:value-type="float">
            <text:p><text:s/>5,117.21 </text:p>
          </table:table-cell>
          <table:table-cell table:style-name="ce792" table:formula="of:=1/(1+[.$B$1])^[.A51]" office:value-type="float" office:value="0.835620384800877" calcext:value-type="float">
            <text:p><text:s/>0.84 </text:p>
          </table:table-cell>
          <table:table-cell table:style-name="ce789" table:formula="of:=[.B51]*[.C51]" office:value-type="float" office:value="4276.0453344578" calcext:value-type="float">
            <text:p><text:s/>4,276.05 </text:p>
          </table:table-cell>
          <table:table-cell table:style-name="ce785"/>
          <table:table-cell table:number-columns-repeated="7"/>
          <table:table-cell table:style-name="ce224" table:formula="of:=+[.M40]" office:value-type="float" office:value="2021" calcext:value-type="float">
            <text:p>2021</text:p>
          </table:table-cell>
          <table:table-cell table:style-name="ce818" table:formula="of:=+[.N6]*[.$N$48]" office:value-type="float" office:value="3185.70442141921" calcext:value-type="float">
            <text:p>3185.70</text:p>
          </table:table-cell>
          <table:table-cell table:style-name="ce818" table:formula="of:=+[.O6]*[.$O$48]" office:value-type="float" office:value="17.46" calcext:value-type="float">
            <text:p>17.46</text:p>
          </table:table-cell>
          <table:table-cell table:style-name="ce818" table:formula="of:=[.N51]*[.O51]" office:value-type="float" office:value="55622.3991979794" calcext:value-type="float">
            <text:p>55622.40</text:p>
          </table:table-cell>
          <table:table-cell table:number-columns-repeated="16368"/>
        </table:table-row>
        <table:table-row table:style-name="ro1">
          <table:table-cell table:style-name="ce781" office:value-type="float" office:value="2" calcext:value-type="float">
            <text:p>2</text:p>
          </table:table-cell>
          <table:table-cell table:style-name="ce789" table:formula="of:=+[.BE19]" office:value-type="float" office:value="54831.4576066275" calcext:value-type="float">
            <text:p><text:s/>54,831.46 </text:p>
          </table:table-cell>
          <table:table-cell table:style-name="ce792" table:formula="of:=1/(1+[.$B$1])^[.A52]" office:value-type="float" office:value="0.698261427494766" calcext:value-type="float">
            <text:p><text:s/>0.70 </text:p>
          </table:table-cell>
          <table:table-cell table:style-name="ce789" table:formula="of:=[.B52]*[.C52]" office:value-type="float" office:value="38286.6918600224" calcext:value-type="float">
            <text:p><text:s/>38,286.69 </text:p>
          </table:table-cell>
          <table:table-cell table:style-name="ce785"/>
          <table:table-cell table:number-columns-repeated="7"/>
          <table:table-cell table:style-name="ce224" table:formula="of:=+[.M41]" office:value-type="float" office:value="2022" calcext:value-type="float">
            <text:p>2022</text:p>
          </table:table-cell>
          <table:table-cell table:style-name="ce818" table:formula="of:=+[.N7]*[.$N$48]" office:value-type="float" office:value="11443.696" calcext:value-type="float">
            <text:p>11443.70</text:p>
          </table:table-cell>
          <table:table-cell table:style-name="ce818" table:formula="of:=+[.O7]*[.$O$48]" office:value-type="float" office:value="17.46" calcext:value-type="float">
            <text:p>17.46</text:p>
          </table:table-cell>
          <table:table-cell table:style-name="ce818" table:formula="of:=[.N52]*[.O52]" office:value-type="float" office:value="199806.93216" calcext:value-type="float">
            <text:p>199806.93</text:p>
          </table:table-cell>
          <table:table-cell table:number-columns-repeated="16368"/>
        </table:table-row>
        <table:table-row table:style-name="ro1">
          <table:table-cell table:style-name="ce781" office:value-type="float" office:value="3" calcext:value-type="float">
            <text:p>3</text:p>
          </table:table-cell>
          <table:table-cell table:style-name="ce789" table:formula="of:=+[.BF19]" office:value-type="float" office:value="54635.3568192796" calcext:value-type="float">
            <text:p><text:s/>54,635.36 </text:p>
          </table:table-cell>
          <table:table-cell table:style-name="ce792" table:formula="of:=1/(1+[.$B$1])^[.A53]" office:value-type="float" office:value="0.583481482734786" calcext:value-type="float">
            <text:p><text:s/>0.58 </text:p>
          </table:table-cell>
          <table:table-cell table:style-name="ce789" table:formula="of:=[.B53]*[.C53]" office:value-type="float" office:value="31878.7190066573" calcext:value-type="float">
            <text:p><text:s/>31,878.72 </text:p>
          </table:table-cell>
          <table:table-cell table:style-name="ce785"/>
          <table:table-cell table:number-columns-repeated="7"/>
          <table:table-cell table:style-name="ce224" table:formula="of:=+[.M42]" office:value-type="float" office:value="2023" calcext:value-type="float">
            <text:p>2023</text:p>
          </table:table-cell>
          <table:table-cell table:style-name="ce818" table:formula="of:=+[.N8]*[.$N$48]" office:value-type="float" office:value="11443.696" calcext:value-type="float">
            <text:p>11443.70</text:p>
          </table:table-cell>
          <table:table-cell table:style-name="ce818" table:formula="of:=+[.O8]*[.$O$48]" office:value-type="float" office:value="17.46" calcext:value-type="float">
            <text:p>17.46</text:p>
          </table:table-cell>
          <table:table-cell table:style-name="ce818" table:formula="of:=[.N53]*[.O53]" office:value-type="float" office:value="199806.93216" calcext:value-type="float">
            <text:p>199806.93</text:p>
          </table:table-cell>
          <table:table-cell table:number-columns-repeated="16368"/>
        </table:table-row>
        <table:table-row table:style-name="ro1">
          <table:table-cell table:style-name="ce781" office:value-type="float" office:value="4" calcext:value-type="float">
            <text:p>4</text:p>
          </table:table-cell>
          <table:table-cell table:style-name="ce789" table:formula="of:=+[.BG19]" office:value-type="float" office:value="54400.035874462" calcext:value-type="float">
            <text:p><text:s/>54,400.04 </text:p>
          </table:table-cell>
          <table:table-cell table:style-name="ce792" table:formula="of:=1/(1+[.$B$1])^[.A54]" office:value-type="float" office:value="0.487569021127028" calcext:value-type="float">
            <text:p><text:s/>0.49 </text:p>
          </table:table-cell>
          <table:table-cell table:style-name="ce789" table:formula="of:=[.B54]*[.C54]" office:value-type="float" office:value="26523.7722405866" calcext:value-type="float">
            <text:p><text:s/>26,523.77 </text:p>
          </table:table-cell>
          <table:table-cell table:style-name="ce785"/>
          <table:table-cell table:number-columns-repeated="7"/>
          <table:table-cell table:style-name="ce224" table:formula="of:=+[.M43]" office:value-type="float" office:value="2024" calcext:value-type="float">
            <text:p>2024</text:p>
          </table:table-cell>
          <table:table-cell table:style-name="ce818" table:formula="of:=+[.N9]*[.$N$48]" office:value-type="float" office:value="11443.696" calcext:value-type="float">
            <text:p>11443.70</text:p>
          </table:table-cell>
          <table:table-cell table:style-name="ce818" table:formula="of:=+[.O9]*[.$O$48]" office:value-type="float" office:value="17.46" calcext:value-type="float">
            <text:p>17.46</text:p>
          </table:table-cell>
          <table:table-cell table:style-name="ce818" table:formula="of:=[.N54]*[.O54]" office:value-type="float" office:value="199806.93216" calcext:value-type="float">
            <text:p>199806.93</text:p>
          </table:table-cell>
          <table:table-cell table:number-columns-repeated="16368"/>
        </table:table-row>
        <table:table-row table:style-name="ro1">
          <table:table-cell table:style-name="ce781" office:value-type="float" office:value="5" calcext:value-type="float">
            <text:p>5</text:p>
          </table:table-cell>
          <table:table-cell table:style-name="ce789" table:formula="of:=+[.BH19]" office:value-type="float" office:value="176299.448668577" calcext:value-type="float">
            <text:p><text:s/>176,299.45 </text:p>
          </table:table-cell>
          <table:table-cell table:style-name="ce792" table:formula="of:=1/(1+[.$B$1])^[.A55]" office:value-type="float" office:value="0.407422613051154" calcext:value-type="float">
            <text:p><text:s/>0.41 </text:p>
          </table:table-cell>
          <table:table-cell table:style-name="ce789" table:formula="of:=[.B55]*[.C55]" office:value-type="float" office:value="71828.3820560294" calcext:value-type="float">
            <text:p><text:s/>71,828.38 </text:p>
          </table:table-cell>
          <table:table-cell table:style-name="ce785"/>
          <table:table-cell table:number-columns-repeated="7"/>
          <table:table-cell table:style-name="ce224" table:formula="of:=+[.M44]" office:value-type="float" office:value="2025" calcext:value-type="float">
            <text:p>2025</text:p>
          </table:table-cell>
          <table:table-cell table:style-name="ce818" table:formula="of:=+[.N10]*[.$N$48]" office:value-type="float" office:value="11443.696" calcext:value-type="float">
            <text:p>11443.70</text:p>
          </table:table-cell>
          <table:table-cell table:style-name="ce818" table:formula="of:=+[.O10]*[.$O$48]" office:value-type="float" office:value="17.46" calcext:value-type="float">
            <text:p>17.46</text:p>
          </table:table-cell>
          <table:table-cell table:style-name="ce818" table:formula="of:=[.N55]*[.O55]" office:value-type="float" office:value="199806.93216" calcext:value-type="float">
            <text:p>199806.93</text:p>
          </table:table-cell>
          <table:table-cell table:number-columns-repeated="16368"/>
        </table:table-row>
        <table:table-row table:style-name="ro1">
          <table:table-cell table:style-name="ce782" office:value-type="string" calcext:value-type="string" table:number-columns-spanned="3" table:number-rows-spanned="1">
            <text:p>VANE</text:p>
          </table:table-cell>
          <table:covered-table-cell table:style-name="ce790"/>
          <table:covered-table-cell table:style-name="ce793"/>
          <table:table-cell table:style-name="ce794" table:formula="of:=SUM([.D50:.D55])" office:value-type="float" office:value="32735.0451122305" calcext:value-type="float">
            <text:p><text:s/>32,735.05 </text:p>
          </table:table-cell>
          <table:table-cell table:style-name="ce785"/>
          <table:table-cell table:number-columns-repeated="16379"/>
        </table:table-row>
        <table:table-row table:style-name="ro1">
          <table:table-cell table:style-name="ce782" office:value-type="string" calcext:value-type="string" table:number-columns-spanned="3" table:number-rows-spanned="1">
            <text:p>TIRE</text:p>
          </table:table-cell>
          <table:covered-table-cell table:style-name="ce790"/>
          <table:covered-table-cell table:style-name="ce793"/>
          <table:table-cell table:style-name="ce795" table:formula="of:=IRR([.B50:.B55];[.B46])" office:value-type="percentage" office:value="0.267265778146359" calcext:value-type="percentage">
            <text:p>26.73 %</text:p>
          </table:table-cell>
          <table:table-cell table:style-name="ce785"/>
          <table:table-cell table:number-columns-repeated="16379"/>
        </table:table-row>
        <table:table-row table:style-name="ro22">
          <table:table-cell table:style-name="ce785"/>
          <table:table-cell table:style-name="ce791" table:number-columns-repeated="3"/>
          <table:table-cell table:style-name="ce785"/>
          <table:table-cell table:number-columns-repeated="16379"/>
        </table:table-row>
        <table:table-row table:style-name="ro22">
          <table:table-cell table:style-name="ce786" office:value-type="string" calcext:value-type="string" table:number-columns-spanned="3" table:number-rows-spanned="1">
            <text:p>Caida del precio en</text:p>
          </table:table-cell>
          <table:covered-table-cell table:number-columns-repeated="2" table:style-name="ce786"/>
          <table:table-cell table:style-name="ce798" office:value-type="percentage" office:value="0.08" calcext:value-type="percentage">
            <text:p>8 %</text:p>
          </table:table-cell>
          <table:table-cell table:style-name="ce785"/>
          <table:table-cell table:number-columns-repeated="8"/>
          <table:table-cell table:style-name="ce819" table:formula="of:=+[.N3]" office:value-type="percentage" office:value="1" calcext:value-type="percentage">
            <text:p>100 %</text:p>
          </table:table-cell>
          <table:table-cell table:style-name="ce819" table:formula="of:=+[.O3]-[.D59]" office:value-type="percentage" office:value="0.92" calcext:value-type="percentage">
            <text:p>92 %</text:p>
          </table:table-cell>
          <table:table-cell table:number-columns-repeated="16369"/>
        </table:table-row>
        <table:table-row table:style-name="ro1">
          <table:table-cell table:style-name="ce537" office:value-type="string" calcext:value-type="string">
            <text:p>AÑO</text:p>
          </table:table-cell>
          <table:table-cell table:style-name="ce537" office:value-type="string" calcext:value-type="string">
            <text:p>FCE</text:p>
          </table:table-cell>
          <table:table-cell table:style-name="ce537" office:value-type="string" calcext:value-type="string">
            <text:p>FA</text:p>
          </table:table-cell>
          <table:table-cell table:style-name="ce537" office:value-type="string" calcext:value-type="string">
            <text:p>VAN</text:p>
          </table:table-cell>
          <table:table-cell table:style-name="ce785"/>
          <table:table-cell table:number-columns-repeated="7"/>
          <table:table-cell table:style-name="ce227" office:value-type="string" calcext:value-type="string" table:number-columns-spanned="1" table:number-rows-spanned="2">
            <text:p>Años</text:p>
          </table:table-cell>
          <table:table-cell table:style-name="ce227" office:value-type="string" calcext:value-type="string" table:number-columns-spanned="1" table:number-rows-spanned="2">
            <text:p>Produccion (UND.)</text:p>
          </table:table-cell>
          <table:table-cell table:style-name="ce227" office:value-type="string" calcext:value-type="string" table:number-columns-spanned="1" table:number-rows-spanned="2">
            <text:p>Precio por Und (S/.)</text:p>
          </table:table-cell>
          <table:table-cell table:style-name="ce227" office:value-type="string" calcext:value-type="string" table:number-columns-spanned="1" table:number-rows-spanned="2">
            <text:p>Ventas proyectadas (S/.)</text:p>
          </table:table-cell>
          <table:table-cell table:number-columns-repeated="16368"/>
        </table:table-row>
        <table:table-row table:style-name="ro1">
          <table:table-cell table:style-name="ce781" office:value-type="float" office:value="0" calcext:value-type="float">
            <text:p>0</text:p>
          </table:table-cell>
          <table:table-cell table:style-name="ce789" table:formula="of:=+[.BL19]" office:value-type="float" office:value="-140058.565385523" calcext:value-type="float">
            <text:p><text:s/>(140,058.57)</text:p>
          </table:table-cell>
          <table:table-cell table:style-name="ce792" table:formula="of:=1/(1+[.$B$1])^[.A61]" office:value-type="float" office:value="1" calcext:value-type="float">
            <text:p><text:s/>1.00 </text:p>
          </table:table-cell>
          <table:table-cell table:style-name="ce789" table:formula="of:=[.B61]*[.C61]" office:value-type="float" office:value="-140058.565385523" calcext:value-type="float">
            <text:p><text:s/>(140,058.57)</text:p>
          </table:table-cell>
          <table:table-cell table:number-columns-repeated="8"/>
          <table:covered-table-cell table:number-columns-repeated="4" table:style-name="ce227"/>
          <table:table-cell table:number-columns-repeated="16368"/>
        </table:table-row>
        <table:table-row table:style-name="ro1">
          <table:table-cell table:style-name="ce781" office:value-type="float" office:value="1" calcext:value-type="float">
            <text:p>1</text:p>
          </table:table-cell>
          <table:table-cell table:style-name="ce789" table:formula="of:=+[.BM19]" office:value-type="float" office:value="2250.07643377022" calcext:value-type="float">
            <text:p><text:s/>2,250.08 </text:p>
          </table:table-cell>
          <table:table-cell table:style-name="ce792" table:formula="of:=1/(1+[.$B$1])^[.A62]" office:value-type="float" office:value="0.835620384800877" calcext:value-type="float">
            <text:p><text:s/>0.84 </text:p>
          </table:table-cell>
          <table:table-cell table:style-name="ce789" table:formula="of:=[.B62]*[.C62]" office:value-type="float" office:value="1880.20973541846" calcext:value-type="float">
            <text:p><text:s/>1,880.21 </text:p>
          </table:table-cell>
          <table:table-cell table:number-columns-repeated="8"/>
          <table:table-cell table:style-name="ce224" table:formula="of:=+[.M51]" office:value-type="float" office:value="2021" calcext:value-type="float">
            <text:p>2021</text:p>
          </table:table-cell>
          <table:table-cell table:style-name="ce818" table:formula="of:=+[.N6]*[.$N$59]" office:value-type="float" office:value="3185.70442141921" calcext:value-type="float">
            <text:p>3185.70</text:p>
          </table:table-cell>
          <table:table-cell table:style-name="ce818" table:formula="of:=+[.O6]*[.$O$59]" office:value-type="float" office:value="16.56" calcext:value-type="float">
            <text:p>16.56</text:p>
          </table:table-cell>
          <table:table-cell table:style-name="ce818" table:formula="of:=[.N62]*[.O62]" office:value-type="float" office:value="52755.2652187021" calcext:value-type="float">
            <text:p>52755.27</text:p>
          </table:table-cell>
          <table:table-cell table:number-columns-repeated="16368"/>
        </table:table-row>
        <table:table-row table:style-name="ro1">
          <table:table-cell table:style-name="ce781" office:value-type="float" office:value="2" calcext:value-type="float">
            <text:p>2</text:p>
          </table:table-cell>
          <table:table-cell table:style-name="ce789" table:formula="of:=+[.BN19]" office:value-type="float" office:value="44532.1312066275" calcext:value-type="float">
            <text:p><text:s/>44,532.13 </text:p>
          </table:table-cell>
          <table:table-cell table:style-name="ce792" table:formula="of:=1/(1+[.$B$1])^[.A63]" office:value-type="float" office:value="0.698261427494766" calcext:value-type="float">
            <text:p><text:s/>0.70 </text:p>
          </table:table-cell>
          <table:table-cell table:style-name="ce789" table:formula="of:=[.B63]*[.C63]" office:value-type="float" office:value="31095.0695057239" calcext:value-type="float">
            <text:p><text:s/>31,095.07 </text:p>
          </table:table-cell>
          <table:table-cell table:number-columns-repeated="8"/>
          <table:table-cell table:style-name="ce224" table:formula="of:=+[.M52]" office:value-type="float" office:value="2022" calcext:value-type="float">
            <text:p>2022</text:p>
          </table:table-cell>
          <table:table-cell table:style-name="ce818" table:formula="of:=+[.N7]*[.$N$59]" office:value-type="float" office:value="11443.696" calcext:value-type="float">
            <text:p>11443.70</text:p>
          </table:table-cell>
          <table:table-cell table:style-name="ce818" table:formula="of:=+[.O7]*[.$O$59]" office:value-type="float" office:value="16.56" calcext:value-type="float">
            <text:p>16.56</text:p>
          </table:table-cell>
          <table:table-cell table:style-name="ce818" table:formula="of:=[.N63]*[.O63]" office:value-type="float" office:value="189507.60576" calcext:value-type="float">
            <text:p>189507.61</text:p>
          </table:table-cell>
          <table:table-cell table:number-columns-repeated="16368"/>
        </table:table-row>
        <table:table-row table:style-name="ro1">
          <table:table-cell table:style-name="ce781" office:value-type="float" office:value="3" calcext:value-type="float">
            <text:p>3</text:p>
          </table:table-cell>
          <table:table-cell table:style-name="ce789" table:formula="of:=+[.BO19]" office:value-type="float" office:value="44336.0304192796" calcext:value-type="float">
            <text:p><text:s/>44,336.03 </text:p>
          </table:table-cell>
          <table:table-cell table:style-name="ce792" table:formula="of:=1/(1+[.$B$1])^[.A64]" office:value-type="float" office:value="0.583481482734786" calcext:value-type="float">
            <text:p><text:s/>0.58 </text:p>
          </table:table-cell>
          <table:table-cell table:style-name="ce789" table:formula="of:=[.B64]*[.C64]" office:value-type="float" office:value="25869.2527676158" calcext:value-type="float">
            <text:p><text:s/>25,869.25 </text:p>
          </table:table-cell>
          <table:table-cell table:number-columns-repeated="8"/>
          <table:table-cell table:style-name="ce224" table:formula="of:=+[.M53]" office:value-type="float" office:value="2023" calcext:value-type="float">
            <text:p>2023</text:p>
          </table:table-cell>
          <table:table-cell table:style-name="ce818" table:formula="of:=+[.N8]*[.$N$59]" office:value-type="float" office:value="11443.696" calcext:value-type="float">
            <text:p>11443.70</text:p>
          </table:table-cell>
          <table:table-cell table:style-name="ce818" table:formula="of:=+[.O8]*[.$O$59]" office:value-type="float" office:value="16.56" calcext:value-type="float">
            <text:p>16.56</text:p>
          </table:table-cell>
          <table:table-cell table:style-name="ce818" table:formula="of:=[.N64]*[.O64]" office:value-type="float" office:value="189507.60576" calcext:value-type="float">
            <text:p>189507.61</text:p>
          </table:table-cell>
          <table:table-cell table:number-columns-repeated="16368"/>
        </table:table-row>
        <table:table-row table:style-name="ro1">
          <table:table-cell table:style-name="ce781" office:value-type="float" office:value="4" calcext:value-type="float">
            <text:p>4</text:p>
          </table:table-cell>
          <table:table-cell table:style-name="ce789" table:formula="of:=+[.BP19]" office:value-type="float" office:value="44100.7094744621" calcext:value-type="float">
            <text:p><text:s/>44,100.71 </text:p>
          </table:table-cell>
          <table:table-cell table:style-name="ce792" table:formula="of:=1/(1+[.$B$1])^[.A65]" office:value-type="float" office:value="0.487569021127028" calcext:value-type="float">
            <text:p><text:s/>0.49 </text:p>
          </table:table-cell>
          <table:table-cell table:style-name="ce789" table:formula="of:=[.B65]*[.C65]" office:value-type="float" office:value="21502.1397494709" calcext:value-type="float">
            <text:p><text:s/>21,502.14 </text:p>
          </table:table-cell>
          <table:table-cell table:number-columns-repeated="8"/>
          <table:table-cell table:style-name="ce224" table:formula="of:=+[.M54]" office:value-type="float" office:value="2024" calcext:value-type="float">
            <text:p>2024</text:p>
          </table:table-cell>
          <table:table-cell table:style-name="ce818" table:formula="of:=+[.N9]*[.$N$59]" office:value-type="float" office:value="11443.696" calcext:value-type="float">
            <text:p>11443.70</text:p>
          </table:table-cell>
          <table:table-cell table:style-name="ce818" table:formula="of:=+[.O9]*[.$O$59]" office:value-type="float" office:value="16.56" calcext:value-type="float">
            <text:p>16.56</text:p>
          </table:table-cell>
          <table:table-cell table:style-name="ce818" table:formula="of:=[.N65]*[.O65]" office:value-type="float" office:value="189507.60576" calcext:value-type="float">
            <text:p>189507.61</text:p>
          </table:table-cell>
          <table:table-cell table:number-columns-repeated="16368"/>
        </table:table-row>
        <table:table-row table:style-name="ro1">
          <table:table-cell table:style-name="ce781" office:value-type="float" office:value="5" calcext:value-type="float">
            <text:p>5</text:p>
          </table:table-cell>
          <table:table-cell table:style-name="ce789" table:formula="of:=+[.BQ19]" office:value-type="float" office:value="166000.122268577" calcext:value-type="float">
            <text:p><text:s/>166,000.12 </text:p>
          </table:table-cell>
          <table:table-cell table:style-name="ce792" table:formula="of:=1/(1+[.$B$1])^[.A66]" office:value-type="float" office:value="0.407422613051154" calcext:value-type="float">
            <text:p><text:s/>0.41 </text:p>
          </table:table-cell>
          <table:table-cell table:style-name="ce789" table:formula="of:=[.B66]*[.C66]" office:value-type="float" office:value="67632.2035814747" calcext:value-type="float">
            <text:p><text:s/>67,632.20 </text:p>
          </table:table-cell>
          <table:table-cell table:number-columns-repeated="8"/>
          <table:table-cell table:style-name="ce224" table:formula="of:=+[.M55]" office:value-type="float" office:value="2025" calcext:value-type="float">
            <text:p>2025</text:p>
          </table:table-cell>
          <table:table-cell table:style-name="ce818" table:formula="of:=+[.N10]*[.$N$59]" office:value-type="float" office:value="11443.696" calcext:value-type="float">
            <text:p>11443.70</text:p>
          </table:table-cell>
          <table:table-cell table:style-name="ce818" table:formula="of:=+[.O10]*[.$O$59]" office:value-type="float" office:value="16.56" calcext:value-type="float">
            <text:p>16.56</text:p>
          </table:table-cell>
          <table:table-cell table:style-name="ce818" table:formula="of:=[.N66]*[.O66]" office:value-type="float" office:value="189507.60576" calcext:value-type="float">
            <text:p>189507.61</text:p>
          </table:table-cell>
          <table:table-cell table:number-columns-repeated="16368"/>
        </table:table-row>
        <table:table-row table:style-name="ro1">
          <table:table-cell table:style-name="ce782" office:value-type="string" calcext:value-type="string" table:number-columns-spanned="3" table:number-rows-spanned="1">
            <text:p>VANE</text:p>
          </table:table-cell>
          <table:covered-table-cell table:style-name="ce790"/>
          <table:covered-table-cell table:style-name="ce793"/>
          <table:table-cell table:style-name="ce794" table:formula="of:=SUM([.D61:.D66])" office:value-type="float" office:value="7920.30995418066" calcext:value-type="float">
            <text:p><text:s/>7,920.31 </text:p>
          </table:table-cell>
          <table:table-cell table:number-columns-repeated="16380"/>
        </table:table-row>
        <table:table-row table:style-name="ro1">
          <table:table-cell table:style-name="ce782" office:value-type="string" calcext:value-type="string" table:number-columns-spanned="3" table:number-rows-spanned="1">
            <text:p>TIRE</text:p>
          </table:table-cell>
          <table:covered-table-cell table:style-name="ce790"/>
          <table:covered-table-cell table:style-name="ce793"/>
          <table:table-cell table:style-name="ce795" table:formula="of:=IRR([.B61:.B66];[.B57])" office:value-type="percentage" office:value="0.214107310099611" calcext:value-type="percentage">
            <text:p>21.41 %</text:p>
          </table:table-cell>
          <table:table-cell table:number-columns-repeated="16380"/>
        </table:table-row>
        <table:table-row table:style-name="ro1">
          <table:table-cell table:number-columns-repeated="16384"/>
        </table:table-row>
        <table:table-row table:style-name="ro14">
          <table:table-cell table:style-name="ce786" office:value-type="string" calcext:value-type="string" table:number-columns-spanned="3" table:number-rows-spanned="1">
            <text:p>Caida del precio en</text:p>
          </table:table-cell>
          <table:covered-table-cell table:number-columns-repeated="2" table:style-name="ce786"/>
          <table:table-cell table:style-name="ce798" office:value-type="percentage" office:value="0.16" calcext:value-type="percentage">
            <text:p>16 %</text:p>
          </table:table-cell>
          <table:table-cell table:number-columns-repeated="9"/>
          <table:table-cell table:style-name="ce819" table:formula="of:=+[.N3]" office:value-type="percentage" office:value="1" calcext:value-type="percentage">
            <text:p>100 %</text:p>
          </table:table-cell>
          <table:table-cell table:style-name="ce819" table:formula="of:=+[.O3]-[.D70]" office:value-type="percentage" office:value="0.84" calcext:value-type="percentage">
            <text:p>84 %</text:p>
          </table:table-cell>
          <table:table-cell table:number-columns-repeated="16369"/>
        </table:table-row>
        <table:table-row table:style-name="ro1">
          <table:table-cell table:style-name="ce537" office:value-type="string" calcext:value-type="string">
            <text:p>AÑO</text:p>
          </table:table-cell>
          <table:table-cell table:style-name="ce537" office:value-type="string" calcext:value-type="string">
            <text:p>FCE</text:p>
          </table:table-cell>
          <table:table-cell table:style-name="ce537" office:value-type="string" calcext:value-type="string">
            <text:p>FA</text:p>
          </table:table-cell>
          <table:table-cell table:style-name="ce537" office:value-type="string" calcext:value-type="string">
            <text:p>VAN</text:p>
          </table:table-cell>
          <table:table-cell table:number-columns-repeated="8"/>
          <table:table-cell table:style-name="ce227" office:value-type="string" calcext:value-type="string" table:number-columns-spanned="1" table:number-rows-spanned="2">
            <text:p>Años</text:p>
          </table:table-cell>
          <table:table-cell table:style-name="ce227" office:value-type="string" calcext:value-type="string" table:number-columns-spanned="1" table:number-rows-spanned="2">
            <text:p>Produccion (UND.)</text:p>
          </table:table-cell>
          <table:table-cell table:style-name="ce227" office:value-type="string" calcext:value-type="string" table:number-columns-spanned="1" table:number-rows-spanned="2">
            <text:p>Precio por Und (S/.)</text:p>
          </table:table-cell>
          <table:table-cell table:style-name="ce227" office:value-type="string" calcext:value-type="string" table:number-columns-spanned="1" table:number-rows-spanned="2">
            <text:p>Ventas proyectadas (S/.)</text:p>
          </table:table-cell>
          <table:table-cell table:number-columns-repeated="16368"/>
        </table:table-row>
        <table:table-row table:style-name="ro1">
          <table:table-cell table:style-name="ce781" office:value-type="float" office:value="0" calcext:value-type="float">
            <text:p>0</text:p>
          </table:table-cell>
          <table:table-cell table:style-name="ce789" table:formula="of:=+[.BU19]" office:value-type="float" office:value="-140058.565385523" calcext:value-type="float">
            <text:p><text:s/>(140,058.57)</text:p>
          </table:table-cell>
          <table:table-cell table:style-name="ce792" table:formula="of:=1/(1+[.$B$1])^[.A72]" office:value-type="float" office:value="1" calcext:value-type="float">
            <text:p><text:s/>1.00 </text:p>
          </table:table-cell>
          <table:table-cell table:style-name="ce789" table:formula="of:=[.B72]*[.C72]" office:value-type="float" office:value="-140058.565385523" calcext:value-type="float">
            <text:p><text:s/>(140,058.57)</text:p>
          </table:table-cell>
          <table:table-cell table:number-columns-repeated="8"/>
          <table:covered-table-cell table:number-columns-repeated="4" table:style-name="ce227"/>
          <table:table-cell table:number-columns-repeated="16368"/>
        </table:table-row>
        <table:table-row table:style-name="ro1">
          <table:table-cell table:style-name="ce781" office:value-type="float" office:value="1" calcext:value-type="float">
            <text:p>1</text:p>
          </table:table-cell>
          <table:table-cell table:style-name="ce789" table:formula="of:=+[.BV19]" office:value-type="float" office:value="-2337.33793307345" calcext:value-type="float">
            <text:p><text:s/>(2,337.34)</text:p>
          </table:table-cell>
          <table:table-cell table:style-name="ce792" table:formula="of:=1/(1+[.$B$1])^[.A73]" office:value-type="float" office:value="0.835620384800877" calcext:value-type="float">
            <text:p><text:s/>0.84 </text:p>
          </table:table-cell>
          <table:table-cell table:style-name="ce789" table:formula="of:=[.B73]*[.C73]" office:value-type="float" office:value="-1953.12722304453" calcext:value-type="float">
            <text:p><text:s/>(1,953.13)</text:p>
          </table:table-cell>
          <table:table-cell table:number-columns-repeated="8"/>
          <table:table-cell table:style-name="ce224" table:formula="of:=+[.M62]" office:value-type="float" office:value="2021" calcext:value-type="float">
            <text:p>2021</text:p>
          </table:table-cell>
          <table:table-cell table:style-name="ce818" table:formula="of:=+[.N6]*[.$N$70]" office:value-type="float" office:value="3185.70442141921" calcext:value-type="float">
            <text:p>3185.70</text:p>
          </table:table-cell>
          <table:table-cell table:style-name="ce818" table:formula="of:=+[.O6]*[.$O$70]" office:value-type="float" office:value="15.12" calcext:value-type="float">
            <text:p>15.12</text:p>
          </table:table-cell>
          <table:table-cell table:style-name="ce818" table:formula="of:=[.N73]*[.O73]" office:value-type="float" office:value="48167.8508518585" calcext:value-type="float">
            <text:p>48167.85</text:p>
          </table:table-cell>
          <table:table-cell table:number-columns-repeated="16368"/>
        </table:table-row>
        <table:table-row table:style-name="ro1">
          <table:table-cell table:style-name="ce781" office:value-type="float" office:value="2" calcext:value-type="float">
            <text:p>2</text:p>
          </table:table-cell>
          <table:table-cell table:style-name="ce789" table:formula="of:=+[.BW19]" office:value-type="float" office:value="28053.2089666275" calcext:value-type="float">
            <text:p><text:s/>28,053.21 </text:p>
          </table:table-cell>
          <table:table-cell table:style-name="ce792" table:formula="of:=1/(1+[.$B$1])^[.A74]" office:value-type="float" office:value="0.698261427494766" calcext:value-type="float">
            <text:p><text:s/>0.70 </text:p>
          </table:table-cell>
          <table:table-cell table:style-name="ce789" table:formula="of:=[.B74]*[.C74]" office:value-type="float" office:value="19588.4737388463" calcext:value-type="float">
            <text:p><text:s/>19,588.47 </text:p>
          </table:table-cell>
          <table:table-cell table:number-columns-repeated="8"/>
          <table:table-cell table:style-name="ce224" table:formula="of:=+[.M63]" office:value-type="float" office:value="2022" calcext:value-type="float">
            <text:p>2022</text:p>
          </table:table-cell>
          <table:table-cell table:style-name="ce818" table:formula="of:=+[.N7]*[.$N$70]" office:value-type="float" office:value="11443.696" calcext:value-type="float">
            <text:p>11443.70</text:p>
          </table:table-cell>
          <table:table-cell table:style-name="ce818" table:formula="of:=+[.O7]*[.$O$70]" office:value-type="float" office:value="15.12" calcext:value-type="float">
            <text:p>15.12</text:p>
          </table:table-cell>
          <table:table-cell table:style-name="ce818" table:formula="of:=[.N74]*[.O74]" office:value-type="float" office:value="173028.68352" calcext:value-type="float">
            <text:p>173028.68</text:p>
          </table:table-cell>
          <table:table-cell table:number-columns-repeated="16368"/>
        </table:table-row>
        <table:table-row table:style-name="ro1">
          <table:table-cell table:style-name="ce781" office:value-type="float" office:value="3" calcext:value-type="float">
            <text:p>3</text:p>
          </table:table-cell>
          <table:table-cell table:style-name="ce789" table:formula="of:=+[.BX19]" office:value-type="float" office:value="27857.1081792795" calcext:value-type="float">
            <text:p><text:s/>27,857.11 </text:p>
          </table:table-cell>
          <table:table-cell table:style-name="ce792" table:formula="of:=1/(1+[.$B$1])^[.A75]" office:value-type="float" office:value="0.583481482734786" calcext:value-type="float">
            <text:p><text:s/>0.58 </text:p>
          </table:table-cell>
          <table:table-cell table:style-name="ce789" table:formula="of:=[.B75]*[.C75]" office:value-type="float" office:value="16254.1067851494" calcext:value-type="float">
            <text:p><text:s/>16,254.11 </text:p>
          </table:table-cell>
          <table:table-cell table:number-columns-repeated="8"/>
          <table:table-cell table:style-name="ce224" table:formula="of:=+[.M64]" office:value-type="float" office:value="2023" calcext:value-type="float">
            <text:p>2023</text:p>
          </table:table-cell>
          <table:table-cell table:style-name="ce818" table:formula="of:=+[.N8]*[.$N$70]" office:value-type="float" office:value="11443.696" calcext:value-type="float">
            <text:p>11443.70</text:p>
          </table:table-cell>
          <table:table-cell table:style-name="ce818" table:formula="of:=+[.O8]*[.$O$70]" office:value-type="float" office:value="15.12" calcext:value-type="float">
            <text:p>15.12</text:p>
          </table:table-cell>
          <table:table-cell table:style-name="ce818" table:formula="of:=[.N75]*[.O75]" office:value-type="float" office:value="173028.68352" calcext:value-type="float">
            <text:p>173028.68</text:p>
          </table:table-cell>
          <table:table-cell table:number-columns-repeated="16368"/>
        </table:table-row>
        <table:table-row table:style-name="ro1">
          <table:table-cell table:style-name="ce781" office:value-type="float" office:value="4" calcext:value-type="float">
            <text:p>4</text:p>
          </table:table-cell>
          <table:table-cell table:style-name="ce789" table:formula="of:=+[.BY19]" office:value-type="float" office:value="27621.787234462" calcext:value-type="float">
            <text:p><text:s/>27,621.79 </text:p>
          </table:table-cell>
          <table:table-cell table:style-name="ce792" table:formula="of:=1/(1+[.$B$1])^[.A76]" office:value-type="float" office:value="0.487569021127028" calcext:value-type="float">
            <text:p><text:s/>0.49 </text:p>
          </table:table-cell>
          <table:table-cell table:style-name="ce789" table:formula="of:=[.B76]*[.C76]" office:value-type="float" office:value="13467.5277636857" calcext:value-type="float">
            <text:p><text:s/>13,467.53 </text:p>
          </table:table-cell>
          <table:table-cell table:number-columns-repeated="8"/>
          <table:table-cell table:style-name="ce224" table:formula="of:=+[.M65]" office:value-type="float" office:value="2024" calcext:value-type="float">
            <text:p>2024</text:p>
          </table:table-cell>
          <table:table-cell table:style-name="ce818" table:formula="of:=+[.N9]*[.$N$70]" office:value-type="float" office:value="11443.696" calcext:value-type="float">
            <text:p>11443.70</text:p>
          </table:table-cell>
          <table:table-cell table:style-name="ce818" table:formula="of:=+[.O9]*[.$O$70]" office:value-type="float" office:value="15.12" calcext:value-type="float">
            <text:p>15.12</text:p>
          </table:table-cell>
          <table:table-cell table:style-name="ce818" table:formula="of:=[.N76]*[.O76]" office:value-type="float" office:value="173028.68352" calcext:value-type="float">
            <text:p>173028.68</text:p>
          </table:table-cell>
          <table:table-cell table:number-columns-repeated="16368"/>
        </table:table-row>
        <table:table-row table:style-name="ro1">
          <table:table-cell table:style-name="ce781" office:value-type="float" office:value="5" calcext:value-type="float">
            <text:p>5</text:p>
          </table:table-cell>
          <table:table-cell table:style-name="ce789" table:formula="of:=+[.BZ19]" office:value-type="float" office:value="149521.200028577" calcext:value-type="float">
            <text:p><text:s/>149,521.20 </text:p>
          </table:table-cell>
          <table:table-cell table:style-name="ce792" table:formula="of:=1/(1+[.$B$1])^[.A77]" office:value-type="float" office:value="0.407422613051154" calcext:value-type="float">
            <text:p><text:s/>0.41 </text:p>
          </table:table-cell>
          <table:table-cell table:style-name="ce789" table:formula="of:=[.B77]*[.C77]" office:value-type="float" office:value="60918.3180221871" calcext:value-type="float">
            <text:p><text:s/>60,918.32 </text:p>
          </table:table-cell>
          <table:table-cell table:number-columns-repeated="8"/>
          <table:table-cell table:style-name="ce224" table:formula="of:=+[.M66]" office:value-type="float" office:value="2025" calcext:value-type="float">
            <text:p>2025</text:p>
          </table:table-cell>
          <table:table-cell table:style-name="ce818" table:formula="of:=+[.N10]*[.$N$70]" office:value-type="float" office:value="11443.696" calcext:value-type="float">
            <text:p>11443.70</text:p>
          </table:table-cell>
          <table:table-cell table:style-name="ce818" table:formula="of:=+[.O10]*[.$O$70]" office:value-type="float" office:value="15.12" calcext:value-type="float">
            <text:p>15.12</text:p>
          </table:table-cell>
          <table:table-cell table:style-name="ce818" table:formula="of:=[.N77]*[.O77]" office:value-type="float" office:value="173028.68352" calcext:value-type="float">
            <text:p>173028.68</text:p>
          </table:table-cell>
          <table:table-cell table:number-columns-repeated="16368"/>
        </table:table-row>
        <table:table-row table:style-name="ro1">
          <table:table-cell table:style-name="ce782" office:value-type="string" calcext:value-type="string" table:number-columns-spanned="3" table:number-rows-spanned="1">
            <text:p>VANE</text:p>
          </table:table-cell>
          <table:covered-table-cell table:style-name="ce790"/>
          <table:covered-table-cell table:style-name="ce793"/>
          <table:table-cell table:style-name="ce794" table:formula="of:=SUM([.D72:.D77])" office:value-type="float" office:value="-31783.2662986993" calcext:value-type="float">
            <text:p><text:s/>(31,783.27)</text:p>
          </table:table-cell>
          <table:table-cell table:number-columns-repeated="16380"/>
        </table:table-row>
        <table:table-row table:style-name="ro1">
          <table:table-cell table:style-name="ce782" office:value-type="string" calcext:value-type="string" table:number-columns-spanned="3" table:number-rows-spanned="1">
            <text:p>TIRE</text:p>
          </table:table-cell>
          <table:covered-table-cell table:style-name="ce790"/>
          <table:covered-table-cell table:style-name="ce793"/>
          <table:table-cell table:style-name="ce795" table:formula="of:=IRR([.B72:.B77];[.B68])" office:value-type="percentage" office:value="0.124638701388653" calcext:value-type="percentage">
            <text:p>12.46 %</text:p>
          </table:table-cell>
          <table:table-cell table:number-columns-repeated="16380"/>
        </table:table-row>
        <table:table-row table:style-name="ro1" table:number-rows-repeated="1048496">
          <table:table-cell table:number-columns-repeated="16384"/>
        </table:table-row>
        <table:table-row table:style-name="ro1">
          <table:table-cell table:number-columns-repeated="16384"/>
        </table:table-row>
        <table:named-expressions>
          <table:named-range table:name="_xlnm.Print_Area" table:base-cell-address="$POBLACION.$A$1" table:cell-range-address="$'ANALISIS SESIB'.$F$1:.$K$22" table:range-usable-as="print-range"/>
        </table:named-expressions>
      </table:table>
      <table:table table:name="INDICADORES" table:style-name="ta22" table:print-ranges="INDICADORES.A1:INDICADORES.I21">
        <table:table-column table:style-name="co110" table:default-cell-style-name="ce842"/>
        <table:table-column table:style-name="co49" table:default-cell-style-name="ce843"/>
        <table:table-column table:style-name="co18" table:number-columns-repeated="2" table:default-cell-style-name="ce847"/>
        <table:table-column table:style-name="co63" table:default-cell-style-name="ce847"/>
        <table:table-column table:style-name="co1" table:default-cell-style-name="ce847"/>
        <table:table-column table:style-name="co78" table:number-columns-repeated="3" table:default-cell-style-name="ce847"/>
        <table:table-column table:style-name="co32" table:default-cell-style-name="ce240"/>
        <table:table-column table:style-name="co32" table:default-cell-style-name="Default"/>
        <table:table-column table:style-name="co10" table:default-cell-style-name="Default"/>
        <table:table-column table:style-name="co32" table:number-columns-repeated="16372" table:default-cell-style-name="Default"/>
        <table:table-row table:style-name="ro48">
          <table:table-cell table:style-name="ce836" office:value-type="string" calcext:value-type="string" table:number-columns-spanned="1" table:number-rows-spanned="2">
            <text:p>Indicadores</text:p>
          </table:table-cell>
          <table:table-cell table:style-name="ce836" office:value-type="string" calcext:value-type="string" table:number-columns-spanned="1" table:number-rows-spanned="2">
            <text:p>Unidad de Medida</text:p>
          </table:table-cell>
          <table:table-cell table:style-name="ce836" office:value-type="string" calcext:value-type="string" table:number-columns-spanned="1" table:number-rows-spanned="2">
            <text:p>Línea de Base</text:p>
          </table:table-cell>
          <table:table-cell table:style-name="ce836" office:value-type="string" calcext:value-type="string">
            <text:p>Meta al Finalizar Ciclo / Campaña / Año I</text:p>
          </table:table-cell>
          <table:table-cell table:style-name="ce836" office:value-type="string" calcext:value-type="string">
            <text:p>Meta al Finalizar Ciclo / Campaña / Año II</text:p>
          </table:table-cell>
          <table:table-cell table:style-name="ce836" office:value-type="string" calcext:value-type="string">
            <text:p>Meta al Finalizar Ciclo / Campaña / Año III</text:p>
          </table:table-cell>
          <table:table-cell table:style-name="ce836" office:value-type="string" calcext:value-type="string">
            <text:p>Meta al Finalizar Ciclo / Campaña / Año IV</text:p>
          </table:table-cell>
          <table:table-cell table:style-name="ce836" office:value-type="string" calcext:value-type="string">
            <text:p>Meta al Finalizar Ciclo / Campaña / Año V</text:p>
          </table:table-cell>
          <table:table-cell table:style-name="ce836" office:value-type="string" calcext:value-type="string">
            <text:p>Meta Total</text:p>
          </table:table-cell>
          <table:table-cell table:number-columns-repeated="16375"/>
        </table:table-row>
        <table:table-row table:style-name="ro1">
          <table:covered-table-cell table:number-columns-repeated="3" table:style-name="ce836"/>
          <table:table-cell table:number-columns-repeated="6" table:style-name="ce836" office:value-type="string" calcext:value-type="string">
            <text:p>Programada</text:p>
          </table:table-cell>
          <table:table-cell table:number-columns-repeated="16375"/>
        </table:table-row>
        <table:table-row table:style-name="ro1">
          <table:table-cell table:style-name="ce837" office:value-type="string" calcext:value-type="string">
            <text:p>Empleos generados</text:p>
          </table:table-cell>
          <table:table-cell office:value-type="string" calcext:value-type="string">
            <text:p>Und</text:p>
          </table:table-cell>
          <table:table-cell table:style-name="ce848" office:value-type="float" office:value="6" calcext:value-type="float">
            <text:p>6.00</text:p>
          </table:table-cell>
          <table:table-cell table:number-columns-repeated="6" table:style-name="ce848" office:value-type="float" office:value="31" calcext:value-type="float">
            <text:p>31.00</text:p>
          </table:table-cell>
          <table:table-cell table:number-columns-repeated="16375"/>
        </table:table-row>
        <table:table-row table:style-name="ro1">
          <table:table-cell table:style-name="ce837" office:value-type="string" calcext:value-type="string">
            <text:p>Rendimientos</text:p>
          </table:table-cell>
          <table:table-cell office:value-type="string" calcext:value-type="string">
            <text:p>Und/Galpon</text:p>
          </table:table-cell>
          <table:table-cell table:style-name="ce848" office:value-type="float" office:value="100" calcext:value-type="float">
            <text:p>100.00</text:p>
          </table:table-cell>
          <table:table-cell table:style-name="ce853" table:formula="of:=+[$OFERTA.O11]" office:value-type="float" office:value="1592.85221070961" calcext:value-type="float">
            <text:p>1593</text:p>
          </table:table-cell>
          <table:table-cell table:style-name="ce853" table:formula="of:=+[$OFERTA.O15]" office:value-type="float" office:value="5721.848" calcext:value-type="float">
            <text:p>5722</text:p>
          </table:table-cell>
          <table:table-cell table:style-name="ce853" table:formula="of:=+[$OFERTA.O19]" office:value-type="float" office:value="5721.848" calcext:value-type="float">
            <text:p>5722</text:p>
          </table:table-cell>
          <table:table-cell table:style-name="ce853" table:formula="of:=+[.F4]" office:value-type="float" office:value="5721.848" calcext:value-type="float">
            <text:p>5722</text:p>
          </table:table-cell>
          <table:table-cell table:style-name="ce853" table:formula="of:=+[.G4]" office:value-type="float" office:value="5721.848" calcext:value-type="float">
            <text:p>5722</text:p>
          </table:table-cell>
          <table:table-cell table:style-name="ce853" table:formula="of:=+[.H4]" office:value-type="float" office:value="5721.848" calcext:value-type="float">
            <text:p>5722</text:p>
          </table:table-cell>
          <table:table-cell table:number-columns-repeated="16375"/>
        </table:table-row>
        <table:table-row table:style-name="ro1">
          <table:table-cell table:style-name="ce837" office:value-type="string" calcext:value-type="string">
            <text:p>Producción</text:p>
          </table:table-cell>
          <table:table-cell office:value-type="string" calcext:value-type="string">
            <text:p>Und</text:p>
          </table:table-cell>
          <table:table-cell table:style-name="ce849" office:value-type="float" office:value="771" calcext:value-type="float">
            <text:p>771</text:p>
          </table:table-cell>
          <table:table-cell table:style-name="ce849" table:formula="of:=[.D4]*2" office:value-type="float" office:value="3185.70442141921" calcext:value-type="float">
            <text:p>3186</text:p>
          </table:table-cell>
          <table:table-cell table:style-name="ce849" table:formula="of:=[.E4]*2" office:value-type="float" office:value="11443.696" calcext:value-type="float">
            <text:p>11444</text:p>
          </table:table-cell>
          <table:table-cell table:style-name="ce849" table:formula="of:=[.F4]*2" office:value-type="float" office:value="11443.696" calcext:value-type="float">
            <text:p>11444</text:p>
          </table:table-cell>
          <table:table-cell table:style-name="ce849" table:formula="of:=[.G4]*2" office:value-type="float" office:value="11443.696" calcext:value-type="float">
            <text:p>11444</text:p>
          </table:table-cell>
          <table:table-cell table:style-name="ce849" table:formula="of:=[.H4]*2" office:value-type="float" office:value="11443.696" calcext:value-type="float">
            <text:p>11444</text:p>
          </table:table-cell>
          <table:table-cell table:style-name="ce849" table:formula="of:=[.I4]*2" office:value-type="float" office:value="11443.696" calcext:value-type="float">
            <text:p>11444</text:p>
          </table:table-cell>
          <table:table-cell table:number-columns-repeated="16375"/>
        </table:table-row>
        <table:table-row table:style-name="ro1">
          <table:table-cell table:style-name="ce838" office:value-type="string" calcext:value-type="string">
            <text:p>Costo Unitario</text:p>
          </table:table-cell>
          <table:table-cell office:value-type="string" calcext:value-type="string">
            <text:p>S/ </text:p>
          </table:table-cell>
          <table:table-cell table:style-name="ce848" office:value-type="float" office:value="8" calcext:value-type="float">
            <text:p>8.00</text:p>
          </table:table-cell>
          <table:table-cell table:style-name="ce848" table:formula="of:=+[$'ESTADO GyP'.I38]" office:value-type="float" office:value="15.2387277313306" calcext:value-type="float">
            <text:p>15.24</text:p>
          </table:table-cell>
          <table:table-cell table:style-name="ce848" table:formula="of:=+[$'ESTADO GyP'.J38]" office:value-type="float" office:value="10.4481693350353" calcext:value-type="float">
            <text:p>10.45</text:p>
          </table:table-cell>
          <table:table-cell table:style-name="ce848" table:formula="of:=+[$'ESTADO GyP'.K38]" office:value-type="float" office:value="10.4481693350353" calcext:value-type="float">
            <text:p>10.45</text:p>
          </table:table-cell>
          <table:table-cell table:style-name="ce848" table:formula="of:=+[$'ESTADO GyP'.L38]" office:value-type="float" office:value="10.4481693350353" calcext:value-type="float">
            <text:p>10.45</text:p>
          </table:table-cell>
          <table:table-cell table:style-name="ce848" table:formula="of:=+[$'ESTADO GyP'.M38]" office:value-type="float" office:value="10.4481693350353" calcext:value-type="float">
            <text:p>10.45</text:p>
          </table:table-cell>
          <table:table-cell table:style-name="ce848" table:formula="of:=+[.H6]" office:value-type="float" office:value="10.4481693350353" calcext:value-type="float">
            <text:p>10.45</text:p>
          </table:table-cell>
          <table:table-cell table:number-columns-repeated="16375"/>
        </table:table-row>
        <table:table-row table:style-name="ro1">
          <table:table-cell table:style-name="ce838" office:value-type="string" calcext:value-type="string">
            <text:p>Número de Unidades Vendidas</text:p>
          </table:table-cell>
          <table:table-cell office:value-type="string" calcext:value-type="string">
            <text:p>Und</text:p>
          </table:table-cell>
          <table:table-cell table:style-name="ce849" table:formula="of:=+[.C5]" office:value-type="float" office:value="771" calcext:value-type="float">
            <text:p>771</text:p>
          </table:table-cell>
          <table:table-cell table:style-name="ce849" table:formula="of:=+[.D5]" office:value-type="float" office:value="3185.70442141921" calcext:value-type="float">
            <text:p>3186</text:p>
          </table:table-cell>
          <table:table-cell table:style-name="ce849" table:formula="of:=+[.E5]" office:value-type="float" office:value="11443.696" calcext:value-type="float">
            <text:p>11444</text:p>
          </table:table-cell>
          <table:table-cell table:style-name="ce849" table:formula="of:=+[.F5]" office:value-type="float" office:value="11443.696" calcext:value-type="float">
            <text:p>11444</text:p>
          </table:table-cell>
          <table:table-cell table:style-name="ce849" table:formula="of:=+[.G5]" office:value-type="float" office:value="11443.696" calcext:value-type="float">
            <text:p>11444</text:p>
          </table:table-cell>
          <table:table-cell table:style-name="ce849" table:formula="of:=+[.H5]" office:value-type="float" office:value="11443.696" calcext:value-type="float">
            <text:p>11444</text:p>
          </table:table-cell>
          <table:table-cell table:style-name="ce849" table:formula="of:=+[.I5]" office:value-type="float" office:value="11443.696" calcext:value-type="float">
            <text:p>11444</text:p>
          </table:table-cell>
          <table:table-cell table:number-columns-repeated="16375"/>
        </table:table-row>
        <table:table-row table:style-name="ro1">
          <table:table-cell table:style-name="ce839" office:value-type="string" calcext:value-type="string">
            <text:p>Precio Unitario</text:p>
          </table:table-cell>
          <table:table-cell table:style-name="ce844" office:value-type="string" calcext:value-type="string">
            <text:p>S/</text:p>
          </table:table-cell>
          <table:table-cell table:style-name="ce850" office:value-type="float" office:value="16" calcext:value-type="float">
            <text:p>16.00</text:p>
          </table:table-cell>
          <table:table-cell table:style-name="ce850" table:formula="of:=+[$INGRESOS.B10]" office:value-type="float" office:value="18" calcext:value-type="float">
            <text:p>18.00</text:p>
          </table:table-cell>
          <table:table-cell table:style-name="ce850" table:formula="of:=+[$INGRESOS.C10]" office:value-type="float" office:value="18" calcext:value-type="float">
            <text:p>18.00</text:p>
          </table:table-cell>
          <table:table-cell table:style-name="ce850" table:formula="of:=+[$INGRESOS.D10]" office:value-type="float" office:value="18" calcext:value-type="float">
            <text:p>18.00</text:p>
          </table:table-cell>
          <table:table-cell table:style-name="ce850" table:formula="of:=+[$INGRESOS.E10]" office:value-type="float" office:value="18" calcext:value-type="float">
            <text:p>18.00</text:p>
          </table:table-cell>
          <table:table-cell table:style-name="ce850" table:formula="of:=+[$INGRESOS.F10]" office:value-type="float" office:value="18" calcext:value-type="float">
            <text:p>18.00</text:p>
          </table:table-cell>
          <table:table-cell table:style-name="ce850" table:formula="of:=+[.H8]" office:value-type="float" office:value="18" calcext:value-type="float">
            <text:p>18.00</text:p>
          </table:table-cell>
          <table:table-cell table:number-columns-repeated="16375"/>
        </table:table-row>
        <table:table-row table:style-name="ro1">
          <table:table-cell table:style-name="ce839" office:value-type="string" calcext:value-type="string">
            <text:p>Ingresos por Ventas</text:p>
          </table:table-cell>
          <table:table-cell table:style-name="ce844" office:value-type="string" calcext:value-type="string">
            <text:p>S/ </text:p>
          </table:table-cell>
          <table:table-cell table:style-name="ce850" table:formula="of:=PRODUCT([.C7:.C8])" office:value-type="float" office:value="12336" calcext:value-type="float">
            <text:p>12336.00</text:p>
          </table:table-cell>
          <table:table-cell table:style-name="ce850" table:formula="of:=PRODUCT([.D7:.D8])" office:value-type="float" office:value="57342.6795855458" calcext:value-type="float">
            <text:p>57342.68</text:p>
          </table:table-cell>
          <table:table-cell table:style-name="ce850" table:formula="of:=PRODUCT([.E7:.E8])" office:value-type="float" office:value="205986.528" calcext:value-type="float">
            <text:p>205986.53</text:p>
          </table:table-cell>
          <table:table-cell table:style-name="ce850" table:formula="of:=PRODUCT([.F7:.F8])" office:value-type="float" office:value="205986.528" calcext:value-type="float">
            <text:p>205986.53</text:p>
          </table:table-cell>
          <table:table-cell table:style-name="ce850" table:formula="of:=PRODUCT([.G7:.G8])" office:value-type="float" office:value="205986.528" calcext:value-type="float">
            <text:p>205986.53</text:p>
          </table:table-cell>
          <table:table-cell table:style-name="ce850" table:formula="of:=PRODUCT([.H7:.H8])" office:value-type="float" office:value="205986.528" calcext:value-type="float">
            <text:p>205986.53</text:p>
          </table:table-cell>
          <table:table-cell table:style-name="ce850" table:formula="of:=PRODUCT([.I7:.I8])" office:value-type="float" office:value="205986.528" calcext:value-type="float">
            <text:p>205986.53</text:p>
          </table:table-cell>
          <table:table-cell table:number-columns-repeated="16375"/>
        </table:table-row>
        <table:table-row table:style-name="ro1">
          <table:table-cell table:style-name="ce838" office:value-type="string" calcext:value-type="string">
            <text:p>Utilidades netas</text:p>
          </table:table-cell>
          <table:table-cell table:style-name="ce844" office:value-type="string" calcext:value-type="string">
            <text:p>S/</text:p>
          </table:table-cell>
          <table:table-cell table:style-name="ce850" office:value-type="float" office:value="100" calcext:value-type="float">
            <text:p>100.00</text:p>
          </table:table-cell>
          <table:table-cell table:style-name="ce850" table:formula="of:=+[$'ESTADO GyP'.I21]" office:value-type="float" office:value="-1919.49024040877" calcext:value-type="float">
            <text:p>-1919.49</text:p>
          </table:table-cell>
          <table:table-cell table:style-name="ce850" table:formula="of:=+[$'ESTADO GyP'.J21]" office:value-type="float" office:value="52689.6929765876" calcext:value-type="float">
            <text:p>52689.69</text:p>
          </table:table-cell>
          <table:table-cell table:style-name="ce850" table:formula="of:=+[.E10]" office:value-type="float" office:value="52689.6929765876" calcext:value-type="float">
            <text:p>52689.69</text:p>
          </table:table-cell>
          <table:table-cell table:style-name="ce850" table:formula="of:=+[.F10]" office:value-type="float" office:value="52689.6929765876" calcext:value-type="float">
            <text:p>52689.69</text:p>
          </table:table-cell>
          <table:table-cell table:style-name="ce850" table:formula="of:=+[.G10]" office:value-type="float" office:value="52689.6929765876" calcext:value-type="float">
            <text:p>52689.69</text:p>
          </table:table-cell>
          <table:table-cell table:style-name="ce848" table:formula="of:=+[.H10]" office:value-type="float" office:value="52689.6929765876" calcext:value-type="float">
            <text:p>52689.69</text:p>
          </table:table-cell>
          <table:table-cell table:number-columns-repeated="16375"/>
        </table:table-row>
        <table:table-row table:style-name="ro1">
          <table:table-cell table:style-name="ce838" office:value-type="string" calcext:value-type="string">
            <text:p>Número de socios</text:p>
          </table:table-cell>
          <table:table-cell table:style-name="ce844" office:value-type="string" calcext:value-type="string">
            <text:p>Und</text:p>
          </table:table-cell>
          <table:table-cell table:style-name="ce850" office:value-type="float" office:value="15" calcext:value-type="float">
            <text:p>15.00</text:p>
          </table:table-cell>
          <table:table-cell table:style-name="ce850" office:value-type="float" office:value="29" calcext:value-type="float">
            <text:p>29.00</text:p>
          </table:table-cell>
          <table:table-cell table:style-name="ce850" table:formula="of:=[.D11]" office:value-type="float" office:value="29" calcext:value-type="float">
            <text:p>29.00</text:p>
          </table:table-cell>
          <table:table-cell table:style-name="ce850" table:formula="of:=[.E11]" office:value-type="float" office:value="29" calcext:value-type="float">
            <text:p>29.00</text:p>
          </table:table-cell>
          <table:table-cell table:style-name="ce850" table:formula="of:=[.F11]" office:value-type="float" office:value="29" calcext:value-type="float">
            <text:p>29.00</text:p>
          </table:table-cell>
          <table:table-cell table:style-name="ce850" table:formula="of:=[.G11]" office:value-type="float" office:value="29" calcext:value-type="float">
            <text:p>29.00</text:p>
          </table:table-cell>
          <table:table-cell table:style-name="ce850" table:formula="of:=[.H11]" office:value-type="float" office:value="29" calcext:value-type="float">
            <text:p>29.00</text:p>
          </table:table-cell>
          <table:table-cell table:number-columns-repeated="16375"/>
        </table:table-row>
        <table:table-row table:style-name="ro1">
          <table:table-cell table:style-name="ce840" office:value-type="string" calcext:value-type="string">
            <text:p>Utilidad promedio por cada socio del AEO*</text:p>
          </table:table-cell>
          <table:table-cell table:style-name="ce845"/>
          <table:table-cell table:style-name="ce851" table:formula="of:=[.C10]/[.C11]" office:value-type="float" office:value="6.66666666666667" calcext:value-type="float">
            <text:p>6.67</text:p>
          </table:table-cell>
          <table:table-cell table:style-name="ce851" table:formula="of:=[.D10]/[.D11]" office:value-type="float" office:value="-66.1893186347851" calcext:value-type="float">
            <text:p>-66.19</text:p>
          </table:table-cell>
          <table:table-cell table:style-name="ce851" table:formula="of:=[.E10]/[.E11]" office:value-type="float" office:value="1816.88596470992" calcext:value-type="float">
            <text:p>1816.89</text:p>
          </table:table-cell>
          <table:table-cell table:style-name="ce851" table:formula="of:=[.F10]/[.F11]" office:value-type="float" office:value="1816.88596470992" calcext:value-type="float">
            <text:p>1816.89</text:p>
          </table:table-cell>
          <table:table-cell table:style-name="ce851" table:formula="of:=[.G10]/[.G11]" office:value-type="float" office:value="1816.88596470992" calcext:value-type="float">
            <text:p>1816.89</text:p>
          </table:table-cell>
          <table:table-cell table:style-name="ce851" table:formula="of:=[.H10]/[.H11]" office:value-type="float" office:value="1816.88596470992" calcext:value-type="float">
            <text:p>1816.89</text:p>
          </table:table-cell>
          <table:table-cell table:style-name="ce851" table:formula="of:=[.I10]/[.I11]" office:value-type="float" office:value="1816.88596470992" calcext:value-type="float">
            <text:p>1816.89</text:p>
          </table:table-cell>
          <table:table-cell table:number-columns-repeated="16375"/>
        </table:table-row>
        <table:table-row table:style-name="ro1">
          <table:table-cell table:style-name="ce840" office:value-type="string" calcext:value-type="string">
            <text:p>Rentabilidad de las Ventas **</text:p>
          </table:table-cell>
          <table:table-cell table:style-name="ce845"/>
          <table:table-cell table:style-name="ce852" table:formula="of:=[.C10]/[.C9]" office:value-type="percentage" office:value="0.00810635538261998" calcext:value-type="percentage">
            <text:p>0.81 %</text:p>
          </table:table-cell>
          <table:table-cell table:style-name="ce852" table:formula="of:=[.D10]/[.D9]" office:value-type="percentage" office:value="-0.0334740241349414" calcext:value-type="percentage">
            <text:p>-3.35 %</text:p>
          </table:table-cell>
          <table:table-cell table:style-name="ce852" table:formula="of:=[.E10]/[.E9]" office:value-type="percentage" office:value="0.255791936920203" calcext:value-type="percentage">
            <text:p>25.58 %</text:p>
          </table:table-cell>
          <table:table-cell table:style-name="ce852" table:formula="of:=[.F10]/[.F9]" office:value-type="percentage" office:value="0.255791936920203" calcext:value-type="percentage">
            <text:p>25.58 %</text:p>
          </table:table-cell>
          <table:table-cell table:style-name="ce852" table:formula="of:=[.G10]/[.G9]" office:value-type="percentage" office:value="0.255791936920203" calcext:value-type="percentage">
            <text:p>25.58 %</text:p>
          </table:table-cell>
          <table:table-cell table:style-name="ce852" table:formula="of:=[.H10]/[.H9]" office:value-type="percentage" office:value="0.255791936920203" calcext:value-type="percentage">
            <text:p>25.58 %</text:p>
          </table:table-cell>
          <table:table-cell table:style-name="ce852" table:formula="of:=[.I10]/[.I9]" office:value-type="percentage" office:value="0.255791936920203" calcext:value-type="percentage">
            <text:p>25.58 %</text:p>
          </table:table-cell>
          <table:table-cell table:number-columns-repeated="16375"/>
        </table:table-row>
        <table:table-row table:style-name="ro1">
          <table:table-cell table:style-name="ce840" office:value-type="string" calcext:value-type="string">
            <text:p>Rentabilidad de la Inversión***</text:p>
          </table:table-cell>
          <table:table-cell table:style-name="ce845"/>
          <table:table-cell table:style-name="ce851" table:formula="of:=([.C9]-[.C6]*[.C7])/[.$L$16]" office:value-type="float" office:value="0.0440387203954435" calcext:value-type="float">
            <text:p>0.04</text:p>
          </table:table-cell>
          <table:table-cell table:style-name="ce851" table:formula="of:=([.D9]-[.D6]*[.D7])/[.$L$16]" office:value-type="float" office:value="0.0628065641742733" calcext:value-type="float">
            <text:p>0.06</text:p>
          </table:table-cell>
          <table:table-cell table:style-name="ce851" table:formula="of:=([.E9]-[.E6]*[.E7])/[.$L$16]" office:value-type="float" office:value="0.617033696835696" calcext:value-type="float">
            <text:p>0.62</text:p>
          </table:table-cell>
          <table:table-cell table:style-name="ce851" table:formula="of:=([.F9]-[.F6]*[.F7])/[.$L$16]" office:value-type="float" office:value="0.617033696835696" calcext:value-type="float">
            <text:p>0.62</text:p>
          </table:table-cell>
          <table:table-cell table:style-name="ce851" table:formula="of:=([.G9]-[.G6]*[.G7])/[.$L$16]" office:value-type="float" office:value="0.617033696835696" calcext:value-type="float">
            <text:p>0.62</text:p>
          </table:table-cell>
          <table:table-cell table:style-name="ce851" table:formula="of:=([.H9]-[.H6]*[.H7])/[.$L$16]" office:value-type="float" office:value="0.617033696835696" calcext:value-type="float">
            <text:p>0.62</text:p>
          </table:table-cell>
          <table:table-cell table:style-name="ce851" table:formula="of:=([.I9]-[.I6]*[.I7])/[.$L$16]" office:value-type="float" office:value="0.617033696835696" calcext:value-type="float">
            <text:p>0.62</text:p>
          </table:table-cell>
          <table:table-cell table:number-columns-repeated="16375"/>
        </table:table-row>
        <table:table-row table:style-name="ro1">
          <table:table-cell table:style-name="ce840" office:value-type="string" calcext:value-type="string">
            <text:p>Ingresos promedio por cada socio del AEO ****</text:p>
          </table:table-cell>
          <table:table-cell table:style-name="ce846"/>
          <table:table-cell table:style-name="ce851" table:formula="of:=[.C9]/[.C11]" office:value-type="float" office:value="822.4" calcext:value-type="float">
            <text:p>822.40</text:p>
          </table:table-cell>
          <table:table-cell table:style-name="ce851" table:formula="of:=[.D9]/[.D11]" office:value-type="float" office:value="1977.33377881192" calcext:value-type="float">
            <text:p>1977.33</text:p>
          </table:table-cell>
          <table:table-cell table:style-name="ce851" table:formula="of:=[.E9]/[.E11]" office:value-type="float" office:value="7102.98372413793" calcext:value-type="float">
            <text:p>7102.98</text:p>
          </table:table-cell>
          <table:table-cell table:style-name="ce851" table:formula="of:=[.F9]/[.F11]" office:value-type="float" office:value="7102.98372413793" calcext:value-type="float">
            <text:p>7102.98</text:p>
          </table:table-cell>
          <table:table-cell table:style-name="ce851" table:formula="of:=[.G9]/[.G11]" office:value-type="float" office:value="7102.98372413793" calcext:value-type="float">
            <text:p>7102.98</text:p>
          </table:table-cell>
          <table:table-cell table:style-name="ce851" table:formula="of:=[.H9]/[.H11]" office:value-type="float" office:value="7102.98372413793" calcext:value-type="float">
            <text:p>7102.98</text:p>
          </table:table-cell>
          <table:table-cell table:style-name="ce851" table:formula="of:=[.I9]/[.I11]" office:value-type="float" office:value="7102.98372413793" calcext:value-type="float">
            <text:p>7102.98</text:p>
          </table:table-cell>
          <table:table-cell table:number-columns-repeated="16375"/>
        </table:table-row>
        <table:table-row table:style-name="ro1">
          <table:table-cell table:style-name="ce841" office:value-type="string" calcext:value-type="string" table:number-columns-spanned="9" table:number-rows-spanned="1">
            <text:p>* Se obtiene de dividir la utilidad total entre el número de productores que integran un AEO.</text:p>
          </table:table-cell>
          <table:covered-table-cell table:number-columns-repeated="8" table:style-name="ce841"/>
          <table:table-cell/>
          <table:table-cell table:style-name="ce854" office:value-type="string" calcext:value-type="string">
            <text:p>Inv. Total</text:p>
          </table:table-cell>
          <table:table-cell table:style-name="ce855" table:formula="of:=+[$INVERSION.F16]" office:value-type="float" office:value="140058.565385523" calcext:value-type="float">
            <text:p>140,058.57</text:p>
          </table:table-cell>
          <table:table-cell table:number-columns-repeated="16372"/>
        </table:table-row>
        <table:table-row table:style-name="ro1">
          <table:table-cell office:value-type="string" calcext:value-type="string" table:number-columns-spanned="9" table:number-rows-spanned="1">
            <text:p>** Se obtiene dividiendo las Utilidades Generadas entre los Ingresos por Ventas.</text:p>
          </table:table-cell>
          <table:covered-table-cell table:style-name="ce847"/>
          <table:covered-table-cell table:number-columns-repeated="7"/>
          <table:table-cell table:number-columns-repeated="16375"/>
        </table:table-row>
        <table:table-row table:style-name="ro1">
          <table:table-cell office:value-type="string" calcext:value-type="string" table:number-columns-spanned="9" table:number-rows-spanned="1">
            <text:p>*** Se obtiene dividiendo la diferencia entre Ingresos por Ventas y el producto del costo unitario por unidades vendidas, entre el total de la inversión de la propuesta productiva.</text:p>
          </table:table-cell>
          <table:covered-table-cell table:style-name="ce847"/>
          <table:covered-table-cell table:number-columns-repeated="7"/>
          <table:table-cell table:number-columns-repeated="16375"/>
        </table:table-row>
        <table:table-row table:style-name="ro1">
          <table:table-cell office:value-type="string" calcext:value-type="string" table:number-columns-spanned="9" table:number-rows-spanned="1">
            <text:p>**** Se obtiene dividiendo los Ingresos por Ventas entre el número de productores que integran un AEO.</text:p>
          </table:table-cell>
          <table:covered-table-cell table:style-name="ce847"/>
          <table:covered-table-cell table:number-columns-repeated="7"/>
          <table:table-cell table:number-columns-repeated="16375"/>
        </table:table-row>
        <table:table-row table:style-name="ro1">
          <table:table-cell office:value-type="string" calcext:value-type="string" table:number-columns-spanned="9" table:number-rows-spanned="1">
            <text:p>El costo de mano de obra se obtiene de multiplicar el costo unitario de la mano de obra por el número de unidades vendidas</text:p>
          </table:table-cell>
          <table:covered-table-cell table:style-name="ce847"/>
          <table:covered-table-cell table:number-columns-repeated="7"/>
          <table:table-cell table:number-columns-repeated="16375"/>
        </table:table-row>
        <table:table-row table:style-name="ro1">
          <table:table-cell office:value-type="string" calcext:value-type="string" table:number-columns-spanned="9" table:number-rows-spanned="1">
            <text:p>Los últimos tres indicadores se levantan a partir del año 3 y hasta el año 5 de manera anual, por ser considerados resultados Finales o de Impacto.</text:p>
          </table:table-cell>
          <table:covered-table-cell table:style-name="ce847"/>
          <table:covered-table-cell table:number-columns-repeated="7"/>
          <table:table-cell table:number-columns-repeated="16375"/>
        </table:table-row>
        <table:table-row table:style-name="ro1">
          <table:table-cell table:style-name="Default" table:number-columns-repeated="10"/>
          <table:table-cell table:number-columns-repeated="16374"/>
        </table:table-row>
        <table:table-row table:style-name="ro1">
          <table:table-cell table:style-name="Default" table:number-columns-repeated="3"/>
          <table:table-cell table:style-name="Default" office:value-type="float" office:value="3254.97173580515" calcext:value-type="float">
            <text:p>3254.97173580515</text:p>
          </table:table-cell>
          <table:table-cell table:number-columns-repeated="3" table:style-name="Default" office:value-type="float" office:value="65892.9181191187" calcext:value-type="float">
            <text:p>65892.9181191187</text:p>
          </table:table-cell>
          <table:table-cell table:style-name="Default" office:value-type="float" office:value="139350.031254712" calcext:value-type="float">
            <text:p>139350.031254712</text:p>
          </table:table-cell>
          <table:table-cell table:style-name="Default" table:number-columns-repeated="2"/>
          <table:table-cell table:number-columns-repeated="16374"/>
        </table:table-row>
        <table:named-expressions>
          <table:named-range table:name="_xlnm.Print_Area" table:base-cell-address="$POBLACION.$A$1" table:cell-range-address="$INDICADORES.$A$1:.$I$21" table:range-usable-as="print-range"/>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Narrow" svg:font-family="'Arial Narrow'" style:font-family-generic="swiss"/>
    <style:font-face style:name="Arial1" svg:font-family="Arial"/>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office:font-face-decls>
  <office:styles>
    <style:default-style style:family="table-cell">
      <style:paragraph-properties style:tab-stop-distance="1.25cm"/>
      <style:text-properties style:font-name="Liberation Sans" fo:font-size="10pt" fo:language="es" fo:country="P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PE" style:letter-kerning="true" style:font-family-asian="'DejaVu Sans'" style:font-family-generic-asian="system" style:font-pitch-asian="variable"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 %</number:text>
    </number:percentage-style>
    <number:number-style style:name="N135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5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35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5">
      <number:text loext:blank-width-char="("> </number:text>
      <number:text-content/>
      <number:text loext:blank-width-char=")"> </number:text>
      <style:map style:condition="value()&gt;0" style:apply-style-name="N135P0"/>
      <style:map style:condition="value()&lt;0" style:apply-style-name="N135P1"/>
      <style:map style:condition="value()=0" style:apply-style-name="N135P2"/>
    </number:text-style>
    <number:number-style style:name="N114P0" style:volatile="true">
      <number:text>S/. </number:text>
      <number:number number:decimal-places="0" number:min-decimal-places="0" number:min-integer-digits="1" number:grouping="true"/>
    </number:number-style>
    <number:number-style style:name="N114">
      <number:text>S/. -</number:text>
      <number:number number:decimal-places="0" number:min-decimal-places="0" number:min-integer-digits="1" number:grouping="true"/>
      <style:map style:condition="value()&gt;=0" style:apply-style-name="N114P0"/>
    </number:number-style>
    <number:number-style style:name="N115P0" style:volatile="true">
      <number:text>S/. </number:text>
      <number:number number:decimal-places="0" number:min-decimal-places="0" number:min-integer-digits="1" number:grouping="true"/>
    </number:number-style>
    <number:number-style style:name="N115">
      <style:text-properties fo:color="#ff0000"/>
      <number:text>S/. -</number:text>
      <number:number number:decimal-places="0" number:min-decimal-places="0" number:min-integer-digits="1" number:grouping="true"/>
      <style:map style:condition="value()&gt;=0" style:apply-style-name="N115P0"/>
    </number:number-style>
    <number:number-style style:name="N116P0" style:volatile="true">
      <number:text>S/. </number:text>
      <number:number number:decimal-places="2" number:min-decimal-places="2" number:min-integer-digits="1" number:grouping="true"/>
    </number:number-style>
    <number:number-style style:name="N116">
      <number:text>S/. -</number:text>
      <number:number number:decimal-places="2" number:min-decimal-places="2" number:min-integer-digits="1" number:grouping="true"/>
      <style:map style:condition="value()&gt;=0" style:apply-style-name="N116P0"/>
    </number:number-style>
    <number:number-style style:name="N117P0" style:volatile="true">
      <number:text>S/. </number:text>
      <number:number number:decimal-places="2" number:min-decimal-places="2" number:min-integer-digits="1" number:grouping="true"/>
    </number:number-style>
    <number:number-style style:name="N117">
      <style:text-properties fo:color="#ff0000"/>
      <number:text>S/. -</number:text>
      <number:number number:decimal-places="2" number:min-decimal-places="2" number:min-integer-digits="1" number:grouping="true"/>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number-style style:name="N121P0" style:volatile="true">
      <number:number number:decimal-places="0" number:min-decimal-places="0" number:min-integer-digits="1" number:grouping="true"/>
    </number:number-style>
    <number:number-style style:name="N121">
      <number:text>-</number:text>
      <number:number number:decimal-places="0" number:min-decimal-places="0" number:min-integer-digits="1" number:grouping="true"/>
      <style:map style:condition="value()&gt;=0" style:apply-style-name="N121P0"/>
    </number:number-style>
    <number:number-style style:name="N122P0" style:volatile="true">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3P0" style:volatile="true">
      <number:number number:decimal-places="2" number:min-decimal-places="2" number:min-integer-digits="1" number:grouping="true"/>
    </number:number-style>
    <number:number-style style:name="N123">
      <number:text>-</number:text>
      <number:number number:decimal-places="2" number:min-decimal-places="2" number:min-integer-digits="1" number:grouping="true"/>
      <style:map style:condition="value()&gt;=0" style:apply-style-name="N123P0"/>
    </number:number-style>
    <number:number-style style:name="N124P0" style:volatile="true">
      <number:number number:decimal-places="2" number:min-decimal-places="2" number:min-integer-digits="1" number:grouping="true"/>
    </number:number-style>
    <number:number-style style:name="N124">
      <style:text-properties fo:color="#ff0000"/>
      <number:text>-</number:text>
      <number:number number:decimal-places="2" number:min-decimal-places="2" number:min-integer-digits="1" number:grouping="true"/>
      <style:map style:condition="value()&gt;=0" style:apply-style-name="N124P0"/>
    </number:number-style>
    <number:number-style style:name="N125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25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25P2" style:volatile="true">
      <number:text loext:blank-width-char=" "> </number:text>
      <number:fill-character> </number:fill-character>
      <number:text loext:blank-width-char=" 1">- </number:text>
    </number:number-style>
    <number:text-style style:name="N125">
      <number:text loext:blank-width-char=" "> </number:text>
      <number:text-content/>
      <number:text loext:blank-width-char=" "> </number:text>
      <style:map style:condition="value()&gt;0" style:apply-style-name="N125P0"/>
      <style:map style:condition="value()&lt;0" style:apply-style-name="N125P1"/>
      <style:map style:condition="value()=0" style:apply-style-name="N125P2"/>
    </number:text-style>
    <number:number-style style:name="N126P0" style:volatile="true">
      <number:text loext:blank-width-char=" "> S/. </number:text>
      <number:fill-character> </number:fill-character>
      <number:number number:decimal-places="0" number:min-decimal-places="0" number:min-integer-digits="1" number:grouping="true"/>
      <number:text loext:blank-width-char=" "> </number:text>
    </number:number-style>
    <number:number-style style:name="N126P1" style:volatile="true">
      <number:text loext:blank-width-char=" "> S/. </number:text>
      <number:fill-character> </number:fill-character>
      <number:text>-</number:text>
      <number:number number:decimal-places="0" number:min-decimal-places="0" number:min-integer-digits="1" number:grouping="true"/>
      <number:text loext:blank-width-char=" "> </number:text>
    </number:number-style>
    <number:number-style style:name="N126P2" style:volatile="true">
      <number:text loext:blank-width-char=" "> S/. </number:text>
      <number:fill-character> </number:fill-character>
      <number:text loext:blank-width-char=" 1">- </number:text>
    </number:number-style>
    <number:text-style style:name="N126">
      <number:text loext:blank-width-char=" "> </number:text>
      <number:text-content/>
      <number:text loext:blank-width-char=" "> </number:text>
      <style:map style:condition="value()&gt;0" style:apply-style-name="N126P0"/>
      <style:map style:condition="value()&lt;0" style:apply-style-name="N126P1"/>
      <style:map style:condition="value()=0" style:apply-style-name="N126P2"/>
    </number:text-style>
    <number:number-style style:name="N127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27P1" style:volatile="true">
      <number:text>-</number:text>
      <number:fill-character> </number:fill-character>
      <number:number number:decimal-places="2" number:min-decimal-places="2" number:min-integer-digits="1" number:grouping="true"/>
      <number:text loext:blank-width-char="-"> </number:text>
    </number:number-style>
    <number:number-style style:name="N127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27">
      <number:text loext:blank-width-char="-"> </number:text>
      <number:text-content/>
      <number:text loext:blank-width-char="-"> </number:text>
      <style:map style:condition="value()&gt;0" style:apply-style-name="N127P0"/>
      <style:map style:condition="value()&lt;0" style:apply-style-name="N127P1"/>
      <style:map style:condition="value()=0" style:apply-style-name="N127P2"/>
    </number:text-style>
    <number:number-style style:name="N128P0" style:volatile="true">
      <number:text loext:blank-width-char=" "> S/. </number:text>
      <number:fill-character> </number:fill-character>
      <number:number number:decimal-places="2" number:min-decimal-places="2" number:min-integer-digits="1" number:grouping="true"/>
      <number:text loext:blank-width-char=" "> </number:text>
    </number:number-style>
    <number:number-style style:name="N128P1" style:volatile="true">
      <number:text loext:blank-width-char=" "> S/. </number:text>
      <number:fill-character> </number:fill-character>
      <number:text>-</number:text>
      <number:number number:decimal-places="2" number:min-decimal-places="2" number:min-integer-digits="1" number:grouping="true"/>
      <number:text loext:blank-width-char=" "> </number:text>
    </number:number-style>
    <number:number-style style:name="N128P2" style:volatile="true">
      <number:text loext:blank-width-char=" "> S/. </number:text>
      <number:fill-character> </number:fill-character>
      <number:text>-</number:text>
      <number:number number:decimal-places="0" number:min-decimal-places="0" number:min-integer-digits="2" loext:max-blank-integer-digits="2"/>
      <number:text loext:blank-width-char=" "> </number:text>
    </number:number-style>
    <number:text-style style:name="N128">
      <number:text loext:blank-width-char=" "> </number:text>
      <number:text-content/>
      <number:text loext:blank-width-char=" ">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3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33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33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33">
      <number:text loext:blank-width-char=" "> </number:text>
      <number:text-content/>
      <number:text loext:blank-width-char=" "> </number:text>
      <style:map style:condition="value()&gt;0" style:apply-style-name="N133P0"/>
      <style:map style:condition="value()&lt;0" style:apply-style-name="N133P1"/>
      <style:map style:condition="value()=0" style:apply-style-name="N133P2"/>
    </number:text-style>
    <number:number-style style:name="N134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34P1" style:volatile="true">
      <number:text>-</number:text>
      <number:fill-character> </number:fill-character>
      <number:number number:decimal-places="2" number:min-decimal-places="2" number:min-integer-digits="1" number:grouping="true"/>
      <number:text loext:blank-width-char="€1_-3">    </number:text>
    </number:number-style>
    <number:number-style style:name="N134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34">
      <number:text loext:blank-width-char="-"> </number:text>
      <number:text-content/>
      <number:text loext:blank-width-char="-"> </number:text>
      <style:map style:condition="value()&gt;0" style:apply-style-name="N134P0"/>
      <style:map style:condition="value()&lt;0" style:apply-style-name="N134P1"/>
      <style:map style:condition="value()=0" style:apply-style-name="N134P2"/>
    </number:text-style>
    <number:number-style style:name="N136P0" style:volatile="true">
      <number:text loext:blank-width-char="("> </number:text>
      <number:fill-character> </number:fill-character>
      <number:number number:decimal-places="5" number:min-decimal-places="5" number:min-integer-digits="1" number:grouping="true"/>
      <number:text loext:blank-width-char=")"> </number:text>
    </number:number-style>
    <number:number-style style:name="N136P1" style:volatile="true">
      <number:text loext:blank-width-char="("> </number:text>
      <number:fill-character> </number:fill-character>
      <number:text>(</number:text>
      <number:number number:decimal-places="5" number:min-decimal-places="5" number:min-integer-digits="1" number:grouping="true"/>
      <number:text>)</number:text>
    </number:number-style>
    <number:number-style style:name="N13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37">
      <number:number number:decimal-places="5" number:min-decimal-places="5" number:min-integer-digits="1"/>
    </number:number-style>
    <number:number-style style:name="N138">
      <number:number number:decimal-places="3" number:min-decimal-places="3" number:min-integer-digits="1"/>
    </number:number-style>
    <number:number-style style:name="N139">
      <number:text>S/. </number:text>
      <number:number number:decimal-places="2" number:min-decimal-places="2" number:min-integer-digits="1" number:grouping="true"/>
    </number:number-style>
    <number:number-style style:name="N140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0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1">
      <number:number number:decimal-places="4" number:min-decimal-places="4" number:min-integer-digits="1"/>
    </number:number-style>
    <number:number-style style:name="N142P0" style:volatile="true">
      <number:number number:decimal-places="2" number:min-decimal-places="2" number:min-integer-digits="1" number:grouping="true"/>
      <number:text loext:blank-width-char=" "> </number:text>
    </number:number-style>
    <number:number-style style:name="N142">
      <style:text-properties fo:color="#ff0000"/>
      <number:text>-</number:text>
      <number:number number:decimal-places="2" number:min-decimal-places="2" number:min-integer-digits="1" number:grouping="true"/>
      <number:text> </number:text>
      <style:map style:condition="value()&gt;=0" style:apply-style-name="N142P0"/>
    </number:number-style>
    <number:number-style style:name="N143">
      <number:number number:decimal-places="7" number:min-decimal-places="7" number:min-integer-digits="1"/>
    </number:number-style>
    <number:number-style style:name="N144P0" style:volatile="true">
      <number:text loext:blank-width-char=" "> </number:text>
      <number:fill-character> </number:fill-character>
      <number:number number:decimal-places="4" number:min-decimal-places="4" number:min-integer-digits="1" number:grouping="true"/>
      <number:text loext:blank-width-char=" "> </number:text>
    </number:number-style>
    <number:number-style style:name="N144P1" style:volatile="true">
      <number:text loext:blank-width-char=" "> </number:text>
      <number:fill-character> </number:fill-character>
      <number:text>-</number:text>
      <number:number number:decimal-places="4" number:min-decimal-places="4" number:min-integer-digits="1" number:grouping="true"/>
      <number:text loext:blank-width-char=" "> </number:text>
    </number:number-style>
    <number:number-style style:name="N144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44">
      <number:text loext:blank-width-char=" "> </number:text>
      <number:text-content/>
      <number:text loext:blank-width-char=" "> </number:text>
      <style:map style:condition="value()&gt;0" style:apply-style-name="N144P0"/>
      <style:map style:condition="value()&lt;0" style:apply-style-name="N144P1"/>
      <style:map style:condition="value()=0" style:apply-style-name="N144P2"/>
    </number:text-style>
    <number:number-style style:name="N145P0" style:volatile="true">
      <number:text loext:blank-width-char=" "> </number:text>
      <number:fill-character> </number:fill-character>
      <number:number number:decimal-places="6" number:min-decimal-places="6" number:min-integer-digits="1" number:grouping="true"/>
      <number:text loext:blank-width-char=" "> </number:text>
    </number:number-style>
    <number:number-style style:name="N145P1" style:volatile="true">
      <number:text loext:blank-width-char=" "> </number:text>
      <number:fill-character> </number:fill-character>
      <number:text>-</number:text>
      <number:number number:decimal-places="6" number:min-decimal-places="6" number:min-integer-digits="1" number:grouping="true"/>
      <number:text loext:blank-width-char=" "> </number:text>
    </number:number-style>
    <number:number-style style:name="N145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45">
      <number:text loext:blank-width-char=" "> </number:text>
      <number:text-content/>
      <number:text loext:blank-width-char=" ">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6" number:min-decimal-places="6"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6" number:min-decimal-places="6"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number-style style:name="N147">
      <number:number number:decimal-places="1" number:min-decimal-places="1" number:min-integer-digits="1"/>
    </number:number-style>
    <number:number-style style:name="N148P0" style:volatile="true">
      <number:text loext:blank-width-char=" "> </number:text>
      <number:fill-character> </number:fill-character>
      <number:number number:decimal-places="5" number:min-decimal-places="5" number:min-integer-digits="1" number:grouping="true"/>
      <number:text loext:blank-width-char=" "> </number:text>
    </number:number-style>
    <number:number-style style:name="N148P1" style:volatile="true">
      <number:text loext:blank-width-char=" "> </number:text>
      <number:fill-character> </number:fill-character>
      <number:text>-</number:text>
      <number:number number:decimal-places="5" number:min-decimal-places="5" number:min-integer-digits="1" number:grouping="true"/>
      <number:text loext:blank-width-char=" "> </number:text>
    </number:number-style>
    <number:number-style style:name="N148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48">
      <number:text loext:blank-width-char=" "> </number:text>
      <number:text-content/>
      <number:text loext:blank-width-char=" "> </number:text>
      <style:map style:condition="value()&gt;0" style:apply-style-name="N148P0"/>
      <style:map style:condition="value()&lt;0" style:apply-style-name="N148P1"/>
      <style:map style:condition="value()=0" style:apply-style-name="N148P2"/>
    </number:text-style>
    <number:number-style style:name="N149P0" style:volatile="true">
      <number:text loext:blank-width-char="("> </number:text>
      <number:fill-character> </number:fill-character>
      <number:number number:decimal-places="3" number:min-decimal-places="3" number:min-integer-digits="1" number:grouping="true"/>
      <number:text loext:blank-width-char=")"> </number:text>
    </number:number-style>
    <number:number-style style:name="N149P1" style:volatile="true">
      <number:text loext:blank-width-char="("> </number:text>
      <number:fill-character> </number:fill-character>
      <number:text>(</number:text>
      <number:number number:decimal-places="3" number:min-decimal-places="3" number:min-integer-digits="1" number:grouping="true"/>
      <number:text>)</number:text>
    </number:number-style>
    <number:number-style style:name="N14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number-style style:name="N150P0" style:volatile="true">
      <number:text loext:blank-width-char="("> </number:text>
      <number:fill-character> </number:fill-character>
      <number:number number:decimal-places="4" number:min-decimal-places="4" number:min-integer-digits="1" number:grouping="true"/>
      <number:text loext:blank-width-char=")"> </number:text>
    </number:number-style>
    <number:number-style style:name="N150P1" style:volatile="true">
      <number:text loext:blank-width-char="("> </number:text>
      <number:fill-character> </number:fill-character>
      <number:text>(</number:text>
      <number:number number:decimal-places="4" number:min-decimal-places="4" number:min-integer-digits="1" number:grouping="true"/>
      <number:text>)</number:text>
    </number:number-style>
    <number:number-style style:name="N15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0">
      <number:text loext:blank-width-char="("> </number:text>
      <number:text-content/>
      <number:text loext:blank-width-char=")"> </number:text>
      <style:map style:condition="value()&gt;0" style:apply-style-name="N150P0"/>
      <style:map style:condition="value()&lt;0" style:apply-style-name="N150P1"/>
      <style:map style:condition="value()=0" style:apply-style-name="N150P2"/>
    </number:text-style>
    <style:style style:name="Default" style:family="table-cell">
      <style:table-cell-properties style:rotation-align="none" style:vertical-align="bottom"/>
      <style:text-properties style:font-name="Arial1" fo:font-family="Arial" style:font-name-complex="Arial1"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2_0_25__20_-_20_Énfasis1_20_2" style:display-name="20% - Énfasis1 2" style:family="table-cell" style:parent-style-name="Default">
      <style:table-cell-properties fo:background-color="#dce6f2">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_32_0_25__20_-_20_Énfasis2_20_2" style:display-name="20% - Énfasis2 2" style:family="table-cell" style:parent-style-name="Default">
      <style:table-cell-properties fo:background-color="#f2dcdb">
        <loext:background-complex-color loext:theme-type="accent2"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_32_0_25__20_-_20_Énfasis3_20_2" style:display-name="20% - Énfasis3 2" style:family="table-cell" style:parent-style-name="Default">
      <style:table-cell-properties fo:background-color="#ebf1de">
        <loext:background-complex-color loext:theme-type="accent3"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_32_0_25__20_-_20_Énfasis4_20_2" style:display-name="20% - Énfasis4 2" style:family="table-cell" style:parent-style-name="Default">
      <style:table-cell-properties fo:background-color="#e6e0ec">
        <loext:background-complex-color loext:theme-type="accent4"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_34_0_25__20_-_20_Énfasis3_20_2" style:display-name="40% - Énfasis3 2" style:family="table-cell" style:parent-style-name="Default">
      <style:table-cell-properties fo:background-color="#d7e4bd">
        <loext:background-complex-color loext:theme-type="accent3"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_36_0_25__20_-_20_Énfasis3_20_2" style:display-name="60% - Énfasis3 2" style:family="table-cell" style:parent-style-name="Default">
      <style:table-cell-properties fo:background-color="#c3d69b">
        <loext:background-complex-color loext:theme-type="accent3"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_36_0_25__20_-_20_Énfasis4_20_2" style:display-name="60% - Énfasis4 2" style:family="table-cell" style:parent-style-name="Default">
      <style:table-cell-properties fo:background-color="#b3a2c7">
        <loext:background-complex-color loext:theme-type="accent4"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_36_0_25__20_-_20_Énfasis6_20_2" style:display-name="60% - Énfasis6 2" style:family="table-cell" style:parent-style-name="Default">
      <style:table-cell-properties fo:background-color="#fac090">
        <loext:background-complex-color loext:theme-type="accent6"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Excel_20_Built-in_20_20_25__20_-_20_Accent5" style:display-name="Excel Built-in 20% - Accent5" style:family="table-cell" style:parent-style-name="Default">
      <style:table-cell-properties fo:background-color="#dbeef4">
        <loext:background-complex-color loext:theme-type="accent5"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20_25__20_-_20_Accent6" style:display-name="Excel Built-in 20% - Accent6" style:family="table-cell" style:parent-style-name="Default">
      <style:table-cell-properties fo:background-color="#fdeada">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40_25__20_-_20_Accent1" style:display-name="Excel Built-in 40% - Accent1" style:family="table-cell" style:parent-style-name="Default">
      <style:table-cell-properties fo:background-color="#b9cde5">
        <loext:background-complex-color loext:theme-type="accent1"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40_25__20_-_20_Accent2" style:display-name="Excel Built-in 40% - Accent2" style:family="table-cell" style:parent-style-name="Default">
      <style:table-cell-properties fo:background-color="#e6b9b8">
        <loext:background-complex-color loext:theme-type="accent2"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40_25__20_-_20_Accent4" style:display-name="Excel Built-in 40% - Accent4" style:family="table-cell" style:parent-style-name="Default">
      <style:table-cell-properties fo:background-color="#ccc1da">
        <loext:background-complex-color loext:theme-type="accent4"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40_25__20_-_20_Accent5" style:display-name="Excel Built-in 40% - Accent5" style:family="table-cell" style:parent-style-name="Default">
      <style:table-cell-properties fo:background-color="#b7dee8">
        <loext:background-complex-color loext:theme-type="accent5"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40_25__20_-_20_Accent6" style:display-name="Excel Built-in 40% - Accent6" style:family="table-cell" style:parent-style-name="Default">
      <style:table-cell-properties fo:background-color="#fcd5b5">
        <loext:background-complex-color loext:theme-type="accent6"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60_25__20_-_20_Accent1" style:display-name="Excel Built-in 60% - Accent1" style:family="table-cell" style:parent-style-name="Default">
      <style:table-cell-properties fo:background-color="#95b3d7">
        <loext:background-complex-color loext:theme-type="accent1"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Excel_20_Built-in_20_60_25__20_-_20_Accent2" style:display-name="Excel Built-in 60% - Accent2" style:family="table-cell" style:parent-style-name="Default">
      <style:table-cell-properties fo:background-color="#d99694">
        <loext:background-complex-color loext:theme-type="accent2"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Excel_20_Built-in_20_60_25__20_-_20_Accent5" style:display-name="Excel Built-in 60% - Accent5" style:family="table-cell" style:parent-style-name="Default">
      <style:table-cell-properties fo:background-color="#93cddd">
        <loext:background-complex-color loext:theme-type="accent5"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Excel_20_Built-in_20_Accent1" style:display-name="Excel Built-in Accent1" style:family="table-cell" style:parent-style-name="Default">
      <style:table-cell-properties fo:background-color="#4f81bd">
        <loext:background-complex-color loext:theme-type="accent1"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Excel_20_Built-in_20_Accent2" style:display-name="Excel Built-in Accent2" style:family="table-cell" style:parent-style-name="Default">
      <style:table-cell-properties fo:background-color="#c0504d">
        <loext:background-complex-color loext:theme-type="accent2"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Excel_20_Built-in_20_Accent3" style:display-name="Excel Built-in Accent3" style:family="table-cell" style:parent-style-name="Default">
      <style:table-cell-properties fo:background-color="#9bbb59">
        <loext:background-complex-color loext:theme-type="accent3"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Excel_20_Built-in_20_Accent4" style:display-name="Excel Built-in Accent4" style:family="table-cell" style:parent-style-name="Default">
      <style:table-cell-properties fo:background-color="#8064a2">
        <loext:background-complex-color loext:theme-type="accent4"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Excel_20_Built-in_20_Accent5" style:display-name="Excel Built-in Accent5" style:family="table-cell" style:parent-style-name="Default">
      <style:table-cell-properties fo:background-color="#4bacc6">
        <loext:background-complex-color loext:theme-type="accent5"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Excel_20_Built-in_20_Accent6" style:display-name="Excel Built-in Accent6" style:family="table-cell" style:parent-style-name="Default">
      <style:table-cell-properties fo:background-color="#f79646">
        <loext:background-complex-color loext:theme-type="accent6"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18cm 0.026cm 0.018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loext:border-bottom-complex-color loext:theme-type="accent1" loext:color-type="theme">
          <loext:transformation loext:type="lummod" loext:value="5000"/>
          <loext:transformation loext:type="lumoff" loext:value="4999"/>
        </loext:border-bottom-complex-color>
      </style:table-cell-properties>
      <style:text-properties fo:color="#1f497d"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loext:char-complex-color loext:theme-type="dark2" loext:color-type="theme"/>
      </style:text-properties>
    </style:style>
    <style:style style:name="Excel_20_Built-in_20_Heading_20_3" style:display-name="Excel Built-in Heading 3" style:family="table-cell" style:parent-style-name="Default">
      <style:table-cell-properties fo:border-bottom="1.76pt solid #95b3d7" style:diagonal-bl-tr="none" style:diagonal-tl-br="none" fo:border-left="none" fo:border-right="none" fo:border-top="none">
        <loext:border-bottom-complex-color loext:theme-type="accent1" loext:color-type="theme">
          <loext:transformation loext:type="lummod" loext:value="6000"/>
          <loext:transformation loext:type="lumoff" loext:value="3999"/>
        </loext:border-bottom-complex-color>
      </style:table-cell-properties>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2" loext:color-type="theme"/>
      </style:text-properties>
    </style:style>
    <style:style style:name="Excel_20_Built-in_20_Heading_20_4" style:display-name="Excel Built-in Heading 4" style:family="table-cell" style:parent-style-name="Default">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2" loext:color-type="theme"/>
      </style:text-properties>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18cm 0.026cm 0.018c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loext:char-complex-color loext:theme-type="dark2" loext:color-type="theme"/>
      </style:text-properties>
    </style:style>
    <style:style style:name="Excel_20_Built-in_20_Total" style:display-name="Excel Built-in Total" style:family="table-cell" style:parent-style-name="Default">
      <style:table-cell-properties fo:border-bottom="1.76pt double-thin #4f81bd" style:border-line-width-bottom="0.018cm 0.026cm 0.018cm" style:diagonal-bl-tr="none" style:diagonal-tl-br="none" fo:border-left="none" fo:border-right="none" fo:border-top="0.74pt solid #4f81bd">
        <loext:border-bottom-complex-color loext:theme-type="accent1" loext:color-type="theme"/>
        <loext:border-top-complex-color loext:theme-type="accent1" loext:color-type="theme"/>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ipervínculo_20_2" style:display-name="Hipervínculo 2"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style:style style:name="Millares_20_2" style:display-name="Millares 2" style:family="table-cell" style:parent-style-name="Default" style:data-style-name="N135"/>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Normal_20_4" style:display-name="Normal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as_20_2" style:display-name="Notas 2" style:family="table-cell" style:parent-style-name="Default">
      <style:table-cell-properties fo:background-color="#ffffcc" style:diagonal-bl-tr="none" style:diagonal-tl-br="none" fo:border="0.74pt solid #b2b2b2"/>
    </style:style>
    <style:style style:name="Porcentaje_20_2" style:display-name="Porcentaje 2" style:family="table-cell" style:parent-style-name="Default" style:data-style-name="N10"/>
    <style:style style:name="Excel_20_Built-in_20_Comma" style:display-name="Excel Built-in Comma" style:family="table-cell" style:parent-style-name="Default" style:data-style-name="N135"/>
    <style:style style:name="Excel_20_Built-in_20_Percent" style:display-name="Excel Built-in Percent" style:family="table-cell" style:parent-style-name="Default" style:data-style-name="N10"/>
    <draw:marker draw:name="Puntas_20_de_20_flecha_20_1" draw:display-name="Puntas de flecha 1" svg:viewBox="0 0 20 30" svg:d="M10 0l-10 30h20z"/>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76%"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6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1.001cm" fo:page-height="29.7cm" style:num-format="1" style:print-orientation="portrait" fo:margin-top="5.944cm" fo:margin-bottom="2.54cm" fo:margin-left="1.016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8">
      <style:page-layout-properties fo:page-width="21.001cm" fo:page-height="29.7cm" style:num-format="1" style:print-orientation="portrait" fo:margin-top="3.5cm" fo:margin-bottom="2.499cm" fo:margin-left="0.7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9">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0">
      <style:page-layout-properties fo:page-width="21.001cm" fo:page-height="29.7cm" style:num-format="1" style:print-orientation="portrait" fo:margin-top="1.199cm" fo:margin-bottom="2.499cm" fo:margin-left="1.401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1">
      <style:page-layout-properties fo:page-width="29.7cm" fo:page-height="21.001cm" style:num-format="1" style:print-orientation="landscape" fo:margin-top="1.499cm" fo:margin-bottom="2.54cm" fo:margin-left="0.711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2">
      <style:page-layout-properties fo:page-width="21.001cm" fo:page-height="29.7cm" style:num-format="1" style:print-orientation="portrait" fo:margin-top="6.426cm" fo:margin-bottom="2.54cm" fo:margin-left="2.032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3">
      <style:page-layout-properties fo:page-width="29.7cm" fo:page-height="21.001cm" style:num-format="1" style:print-orientation="landscape" fo:margin-top="2.499cm" fo:margin-bottom="2.499cm" fo:margin-left="1.9cm" fo:margin-right="1.9cm" style:print-page-order="ttb"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4">
      <style:page-layout-properties fo:page-width="29.7cm" fo:page-height="21.001cm" style:num-format="1" style:print-orientation="landscape" fo:margin-top="2.896cm" fo:margin-bottom="2.54cm" fo:margin-left="2.591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5">
      <style:page-layout-properties fo:page-width="21.59cm" fo:page-height="27.94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6">
      <style:page-layout-properties fo:page-width="21.001cm" fo:page-height="29.7cm" style:num-format="1" style:print-orientation="portrait" fo:margin-top="2.54cm" fo:margin-bottom="2.54cm" fo:margin-left="1.905cm" fo:margin-right="1.905cm" style:print-page-order="ttb" style:first-page-number="continue" style:scale-to="89%"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7">
      <style:page-layout-properties fo:page-width="21.001cm" fo:page-height="29.7cm" style:num-format="1" style:print-orientation="portrait" fo:margin-top="2.54cm" fo:margin-bottom="2.54cm" fo:margin-left="1.905cm" fo:margin-right="1.905cm" style:print-page-order="ttb" style:first-page-number="continue" style:scale-to="63%"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8">
      <style:page-layout-properties fo:page-width="21.59cm" fo:page-height="27.94cm" style:num-format="1" style:print-orientation="portrait" fo:margin-top="1.905cm" fo:margin-bottom="1.905cm" fo:margin-left="1.778cm" fo:margin-right="1.778cm" style:print-page-order="ttb" style:first-page-number="continue" style:scale-to="74%"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9">
      <style:page-layout-properties fo:page-width="29.7cm" fo:page-height="21.001cm" style:num-format="1" style:print-orientation="landscape" fo:margin-top="2.413cm" fo:margin-bottom="2.54cm" fo:margin-left="0.965cm" fo:margin-right="1.905cm" style:print-page-order="ttb" style:first-page-number="continue" style:scale-to="78%"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31">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POBLACION" style:display-name="PageStyle_POBLAC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PLAN_20_DE_20_PRODUCCION" style:display-name="PageStyle_PLAN DE PRODUCCION" style:page-layout-name="Mpm4">
      <style:header style:display="false"/>
      <style:header-left style:display="false"/>
      <style:header-first style:display="false"/>
      <style:footer style:display="false"/>
      <style:footer-left style:display="false"/>
      <style:footer-first style:display="false"/>
    </style:master-page>
    <style:master-page style:name="PageStyle_5f_DEMANDA" style:display-name="PageStyle_DEMANDA" style:page-layout-name="Mpm5">
      <style:header style:display="false"/>
      <style:header-left style:display="false"/>
      <style:header-first style:display="false"/>
      <style:footer style:display="false"/>
      <style:footer-left style:display="false"/>
      <style:footer-first style:display="false"/>
    </style:master-page>
    <style:master-page style:name="PageStyle_5f_OFERTA" style:display-name="PageStyle_OFERTA" style:page-layout-name="Mpm6">
      <style:header style:display="false"/>
      <style:header-left style:display="false"/>
      <style:header-first style:display="false"/>
      <style:footer style:display="false"/>
      <style:footer-left style:display="false"/>
      <style:footer-first style:display="false"/>
    </style:master-page>
    <style:master-page style:name="PageStyle_5f_BRECHA" style:display-name="PageStyle_BRECHA" style:page-layout-name="Mpm5">
      <style:header style:display="false"/>
      <style:header-left style:display="false"/>
      <style:header-first style:display="false"/>
      <style:footer style:display="false"/>
      <style:footer-left style:display="false"/>
      <style:footer-first style:display="false"/>
    </style:master-page>
    <style:master-page style:name="PageStyle_5f_INVERS_20_FIJ_20_INTANG" style:display-name="PageStyle_INVERS FIJ INTANG" style:page-layout-name="Mpm7">
      <style:header style:display="false"/>
      <style:header-left style:display="false"/>
      <style:header-first style:display="false"/>
      <style:footer style:display="false"/>
      <style:footer-left style:display="false"/>
      <style:footer-first style:display="false"/>
    </style:master-page>
    <style:master-page style:name="PageStyle_5f_MUEB_2c__20_MAQ_2c_EQUIP" style:display-name="PageStyle_MUEB, MAQ,EQUIP" style:page-layout-name="Mpm8">
      <style:header style:display="false"/>
      <style:header-left style:display="false"/>
      <style:header-first style:display="false"/>
      <style:footer style:display="false"/>
      <style:footer-left style:display="false"/>
      <style:footer-first style:display="false"/>
    </style:master-page>
    <style:master-page style:name="PageStyle_5f_REMUNERACION" style:display-name="PageStyle_REMUNERACION" style:page-layout-name="Mpm9">
      <style:header style:display="false"/>
      <style:header-left style:display="false"/>
      <style:header-first style:display="false"/>
      <style:footer style:display="false"/>
      <style:footer-left style:display="false"/>
      <style:footer-first style:display="false"/>
    </style:master-page>
    <style:master-page style:name="PageStyle_5f_TERREN_20_Y_20_OBR_20_CIV" style:display-name="PageStyle_TERREN Y OBR CIV" style:page-layout-name="Mpm10">
      <style:header style:display="false"/>
      <style:header-left style:display="false"/>
      <style:header-first style:display="false"/>
      <style:footer style:display="false"/>
      <style:footer-left style:display="false"/>
      <style:footer-first style:display="false"/>
    </style:master-page>
    <style:master-page style:name="PageStyle_5f_CAP_20_TRABAJ" style:display-name="PageStyle_CAP TRABAJ" style:page-layout-name="Mpm11">
      <style:header style:display="false"/>
      <style:header-left style:display="false"/>
      <style:header-first style:display="false"/>
      <style:footer style:display="false"/>
      <style:footer-left style:display="false"/>
      <style:footer-first style:display="false"/>
    </style:master-page>
    <style:master-page style:name="PageStyle_5f_INVERSION" style:display-name="PageStyle_INVERSION" style:page-layout-name="Mpm12">
      <style:header style:display="false"/>
      <style:header-left style:display="false"/>
      <style:header-first style:display="false"/>
      <style:footer style:display="false"/>
      <style:footer-left style:display="false"/>
      <style:footer-first style:display="false"/>
    </style:master-page>
    <style:master-page style:name="PageStyle_5f_CRONOG" style:display-name="PageStyle_CRONOG" style:page-layout-name="Mpm13">
      <style:header style:display="false"/>
      <style:header-left style:display="false"/>
      <style:header-first style:display="false"/>
      <style:footer style:display="false"/>
      <style:footer-left style:display="false"/>
      <style:footer-first style:display="false"/>
    </style:master-page>
    <style:master-page style:name="PageStyle_5f_COSTO_20_PROD_20_Y_20_OPER" style:display-name="PageStyle_COSTO PROD Y OPER" style:page-layout-name="Mpm9">
      <style:header style:display="false"/>
      <style:header-left style:display="false"/>
      <style:header-first style:display="false"/>
      <style:footer style:display="false"/>
      <style:footer-left style:display="false"/>
      <style:footer-first style:display="false"/>
    </style:master-page>
    <style:master-page style:name="PageStyle_5f_RESUM_20_INVER" style:display-name="PageStyle_RESUM INVER" style:page-layout-name="Mpm12">
      <style:header style:display="false"/>
      <style:header-left style:display="false"/>
      <style:header-first style:display="false"/>
      <style:footer style:display="false"/>
      <style:footer-left style:display="false"/>
      <style:footer-first style:display="false"/>
    </style:master-page>
    <style:master-page style:name="PageStyle_5f_FINANCIAMIENT" style:display-name="PageStyle_FINANCIAMIENT" style:page-layout-name="Mpm14">
      <style:header style:display="false"/>
      <style:header-left style:display="false"/>
      <style:header-first style:display="false"/>
      <style:footer style:display="false"/>
      <style:footer-left style:display="false"/>
      <style:footer-first style:display="false"/>
    </style:master-page>
    <style:master-page style:name="PageStyle_5f_INGRESOS" style:display-name="PageStyle_INGRESOS" style:page-layout-name="Mpm9">
      <style:header style:display="false"/>
      <style:header-left style:display="false"/>
      <style:header-first style:display="false"/>
      <style:footer style:display="false"/>
      <style:footer-left style:display="false"/>
      <style:footer-first style:display="false"/>
    </style:master-page>
    <style:master-page style:name="PageStyle_5f_DEPRECIAC_20_" style:display-name="PageStyle_DEPRECIAC " style:page-layout-name="Mpm15">
      <style:header style:display="false"/>
      <style:header-left style:display="false"/>
      <style:header-first style:display="false"/>
      <style:footer style:display="false"/>
      <style:footer-left style:display="false"/>
      <style:footer-first style:display="false"/>
    </style:master-page>
    <style:master-page style:name="PageStyle_5f_COSTOS_20_TOTALES" style:display-name="PageStyle_COSTOS TOTALES" style:page-layout-name="Mpm16">
      <style:header style:display="false"/>
      <style:header-left style:display="false"/>
      <style:header-first style:display="false"/>
      <style:footer style:display="false"/>
      <style:footer-left style:display="false"/>
      <style:footer-first style:display="false"/>
    </style:master-page>
    <style:master-page style:name="PageStyle_5f_ESTADO_20_GyP" style:display-name="PageStyle_ESTADO GyP" style:page-layout-name="Mpm17">
      <style:header style:display="false"/>
      <style:header-left style:display="false"/>
      <style:header-first style:display="false"/>
      <style:footer style:display="false"/>
      <style:footer-left style:display="false"/>
      <style:footer-first style:display="false"/>
    </style:master-page>
    <style:master-page style:name="PageStyle_5f_ANALISIS_20_SESIB" style:display-name="PageStyle_ANALISIS SESIB" style:page-layout-name="Mpm6">
      <style:header style:display="false"/>
      <style:header-left style:display="false"/>
      <style:header-first style:display="false"/>
      <style:footer style:display="false"/>
      <style:footer-left style:display="false"/>
      <style:footer-first style:display="false"/>
    </style:master-page>
    <style:master-page style:name="PageStyle_5f_INDICADORES" style:display-name="PageStyle_INDICADORES" style:page-layout-name="Mpm18">
      <style:header style:display="false"/>
      <style:header-left style:display="false"/>
      <style:header-first style:display="false"/>
      <style:footer style:display="false"/>
      <style:footer-left style:display="false"/>
      <style:footer-first style:display="false"/>
    </style:master-page>
    <style:master-page style:name="PageStyle_5f_FLUJO_20_DE_20_CAJA_20_" style:display-name="PageStyle_FLUJO DE CAJA " style:page-layout-name="Mpm19">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eta:initial-creator>
    <dc:creator>User</dc:creator>
    <meta:print-date>2020-08-22T16:58:59</meta:print-date>
    <meta:creation-date>2000-05-01T01:29:57</meta:creation-date>
    <dc:date>2020-09-12T16:14:30</dc:date>
    <meta:generator>LibreOffice/24.2.4.2$Linux_X86_64 LibreOffice_project/420$Build-2</meta:generator>
    <meta:document-statistic meta:table-count="22" meta:cell-count="5663" meta:object-count="4"/>
    <meta:user-defined meta:name="AppVersion">16.0300</meta:user-defined>
    <meta:user-defined meta:name="Company">.</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style:style style:name="ch1" style:family="chart">
      <style:graphic-properties draw:stroke="solid" svg:stroke-width="0.026cm" svg:stroke-color="#46aac4" draw:fill="gradient" draw:fill-gradient-name="msFillGradient_20_1"/>
    </style:style>
    <style:style style:name="ch2" style:family="chart">
      <style:chart-properties chart:auto-position="true" style:rotation-angle="0"/>
      <style:text-properties fo:color="#000000" style:text-position="0% 100%" fo:font-family="'Times New Roman'" style:font-family-generic="roman" fo:font-size="12pt" fo:language="es" fo:country="PE" fo:font-weight="bold" style:font-size-asian="12pt" style:font-weight-asian="bold" style:font-family-complex="'Times New Roman'" style:font-family-generic-complex="roman" style:font-size-complex="12pt" style:font-weight-complex="bold"/>
    </style:style>
    <style:style style:name="ch3" style:family="chart">
      <style:chart-properties chart:auto-position="true"/>
      <style:graphic-properties draw:stroke="none" draw:fill="none" draw:fill-color="#d9d9d9"/>
      <style:text-properties fo:color="#000000" style:text-position="0% 100%" fo:font-family="'Times New Roman'" style:font-family-generic="roman" fo:font-size="10pt" style:font-size-asian="10pt" style:font-family-complex="'Times New Roman'" style:font-family-generic-complex="roman" style:font-size-complex="10pt"/>
    </style:style>
    <style:style style:name="ch4" style:family="chart">
      <style:chart-properties chart:symbol-type="automatic" chart:include-hidden-cells="false" chart:treat-empty-cells="leave-gap"/>
    </style:style>
    <style:style style:name="ch5" style:family="chart" style:data-style-name="N0">
      <style:chart-properties chart:display-label="true" chart:logarithmic="false" chart:text-overlap="true" chart:reverse-direction="false" text:line-break="true" loext:try-staggering-first="false" chart:label-arrangement="side-by-side" chart:link-data-style-to-source="false" loext:major-origin="0.5" chart:axis-position="0" chart:tick-mark-position="at-axis"/>
      <style:graphic-properties svg:stroke-width="0.026cm" svg:stroke-color="#878787"/>
      <style:text-properties fo:color="#000000" style:text-position="0% 100%" fo:font-family="'Times New Roman'" style:font-family-generic="roman" fo:font-size="10pt" style:font-size-asian="10pt" style:font-family-complex="'Times New Roman'" style:font-family-generic-complex="roman" style:font-size-complex="10pt"/>
    </style:style>
    <style:style style:name="ch6" style:family="chart" style:data-style-name="N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Times New Roman'" style:font-family-generic="roman" fo:font-size="10pt" style:font-size-asian="10pt" style:font-family-complex="'Times New Roman'" style:font-family-generic-complex="roman" style:font-size-complex="10pt"/>
    </style:style>
    <style:style style:name="ch7" style:family="chart">
      <style:graphic-properties svg:stroke-width="0.026cm" svg:stroke-color="#878787"/>
    </style:style>
    <style:style style:name="ch8" style:family="chart" style:data-style-name="N3">
      <style:chart-properties chart:symbol-type="automatic" chart:symbol-width="0.176cm" chart:symbol-height="0.176cm" chart:link-data-style-to-source="true" chart:label-position="right">
        <chart:label-separator>
          <text:p>; </text:p>
        </chart:label-separator>
      </style:chart-properties>
      <style:graphic-properties svg:stroke-width="0.079cm" svg:stroke-color="#604a7b" draw:fill-color="#604a7b" fo:wrap-option="wrap"/>
      <style:text-properties fo:color="#000000" style:text-position="0% 100%" fo:font-family="'Times New Roman'" style:font-family-generic="roman" fo:font-size="10pt" style:font-size-asian="10pt" style:font-family-complex="'Times New Roman'" style:font-family-generic-complex="roman" style:font-size-complex="10pt"/>
    </style:style>
    <style:style style:name="ch9" style:family="chart">
      <style:chart-properties chart:regression-name="" chart:regression-max-degree="2" chart:regression-force-intercept="false" chart:regression-period="2" chart:regression-type="linear"/>
      <style:graphic-properties svg:stroke-width="0.026cm"/>
    </style:style>
    <style:style style:name="ch10" style:family="chart">
      <style:text-properties fo:color="#000000" style:text-position="0% 100%" fo:font-family="'Times New Roman'" style:font-family-generic="roman" style:font-family-complex="'Times New Roman'" style:font-family-generic-complex="roman"/>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0.998cm" svg:height="11.192cm" xlink:href=".." xlink:type="simple" chart:class="chart:line" chart:style-name="ch1">
        <chart:title svg:x="1.11cm" svg:y="0.358cm" chart:style-name="ch2">
          <text:p>OFERTA CON PROYECTO CARNE DE CUY UNID/ANUALES</text:p>
        </chart:title>
        <chart:legend chart:legend-position="bottom" svg:x="0.288cm" svg:y="9.698cm" style:legend-expansion="wide" chart:style-name="ch3"/>
        <chart:plot-area chart:style-name="ch4" table:cell-range-address="OFERTA.Q36:OFERTA.Q42" chart:data-source-has-labels="row" svg:x="0.251cm" svg:y="1.975cm" svg:width="9.909cm" svg:height="7.308cm">
          <chart:coordinate-region svg:x="1.349cm" svg:y="2.174cm" svg:width="8.811cm" svg:height="6.462cm"/>
          <chart:axis chart:dimension="x" chart:name="primary-x" chart:style-name="ch5"/>
          <chart:axis chart:dimension="y" chart:name="primary-y" chart:style-name="ch6">
            <chart:grid chart:style-name="ch7" chart:class="major"/>
          </chart:axis>
          <chart:series chart:style-name="ch8" chart:values-cell-range-address="OFERTA.Q37:OFERTA.Q42" chart:label-cell-address="OFERTA.Q36:OFERTA.Q36" chart:class="chart:line">
            <chart:regression-curve chart:style-name="ch9">
              <chart:equation chart:display-equation="true" chart:display-r-square="true" chart:style-name="ch10"/>
            </chart:regression-curve>
            <chart:data-point chart:repeated="6"/>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OFERTA CON PROYECTO CARNE DE CUY UNID/ANUALES</text:p>
                <draw:g>
                  <svg:desc>OFERTA.Q36:OFERTA.Q36</svg:desc>
                </draw:g>
              </table:table-cell>
            </table:table-row>
          </table:table-header-rows>
          <table:table-rows>
            <table:table-row>
              <table:table-cell office:value-type="string">
                <text:p>1</text:p>
              </table:table-cell>
              <table:table-cell office:value-type="float" office:value="0">
                <text:p>0</text:p>
                <draw:g>
                  <svg:desc>OFERTA.Q37:OFERTA.Q42</svg:desc>
                </draw:g>
              </table:table-cell>
            </table:table-row>
            <table:table-row>
              <table:table-cell office:value-type="string">
                <text:p>2</text:p>
              </table:table-cell>
              <table:table-cell office:value-type="float" office:value="3185.70442141921">
                <text:p>3185.70442141921</text:p>
              </table:table-cell>
            </table:table-row>
            <table:table-row>
              <table:table-cell office:value-type="string">
                <text:p>3</text:p>
              </table:table-cell>
              <table:table-cell office:value-type="float" office:value="11443.696">
                <text:p>11443.696</text:p>
              </table:table-cell>
            </table:table-row>
            <table:table-row>
              <table:table-cell office:value-type="string">
                <text:p>4</text:p>
              </table:table-cell>
              <table:table-cell office:value-type="float" office:value="11443.696">
                <text:p>11443.696</text:p>
              </table:table-cell>
            </table:table-row>
            <table:table-row>
              <table:table-cell office:value-type="string">
                <text:p>5</text:p>
              </table:table-cell>
              <table:table-cell office:value-type="float" office:value="11443.696">
                <text:p>11443.696</text:p>
              </table:table-cell>
            </table:table-row>
            <table:table-row>
              <table:table-cell office:value-type="string">
                <text:p>6</text:p>
              </table:table-cell>
              <table:table-cell office:value-type="float" office:value="11443.696">
                <text:p>11443.696</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4.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msFillGradient_20_1" draw:display-name="msFillGradient 1" draw:style="linear" draw:start-color="#a6e6ff" draw:end-color="#e6f7ff" draw:start-intensity="100%" draw:end-intensity="100%" draw:angle="180deg" draw:border="0%">
      <loext:gradient-stop svg:offset="0" loext:color-type="rgb" loext:color-value="#a6e6ff"/>
      <loext:gradient-stop svg:offset="0.35" loext:color-type="rgb" loext:color-value="#bfecff"/>
      <loext:gradient-stop svg:offset="1" loext:color-type="rgb" loext:color-value="#e6f7ff"/>
    </draw:gradient>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4">
      <number:number number:decimal-places="2" number:min-decimal-places="2" number:min-integer-digits="1" number:grouping="true"/>
    </number:number-style>
    <style:style style:name="ch1" style:family="chart">
      <style:graphic-properties draw:stroke="solid" svg:stroke-width="0.026cm" svg:stroke-color="#d9d9d9" draw:fill-color="#aafafc"/>
    </style:style>
    <style:style style:name="ch2" style:family="chart">
      <style:chart-properties chart:auto-position="true" style:rotation-angle="0"/>
      <style:text-properties fo:color="#ff0000" style:text-position="0% 100%" fo:font-family="Calibri" fo:font-size="14pt" fo:language="en" fo:country="US"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ymbol-type="automatic" chart:include-hidden-cells="false" chart:treat-empty-cells="leave-gap"/>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0pt" fo:language="en" fo:country="US" style:font-size-asian="10pt" style:font-size-complex="10pt"/>
    </style:style>
    <style:style style:name="ch7" style:family="chart">
      <style:graphic-properties svg:stroke-width="0.026cm" svg:stroke-color="#d9d9d9"/>
    </style:style>
    <style:style style:name="ch8" style:family="chart" style:data-style-name="N4">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9" style:family="chart">
      <style:chart-properties chart:auto-position="true" style:rotation-angle="90"/>
      <style:text-properties fo:color="#595959" style:text-position="0% 100%" fo:font-family="Calibri" fo:font-size="10pt" fo:language="en" fo:country="US" style:font-size-asian="10pt" style:font-size-complex="10pt"/>
    </style:style>
    <style:style style:name="ch10" style:family="chart" style:data-style-name="N4">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53cm" svg:stroke-color="#00b050" svg:stroke-linecap="round" draw:fill-color="#00b050" fo:wrap-option="wrap"/>
      <style:text-properties fo:color="#000000" style:text-position="0% 100%" fo:font-family="Calibri" fo:font-size="10pt" style:font-size-asian="10pt" style:font-size-complex="10pt"/>
    </style:style>
    <style:style style:name="ch11" style:family="chart">
      <style:chart-properties chart:regression-name="" chart:regression-max-degree="2" chart:regression-force-intercept="false" chart:regression-period="2" chart:regression-type="linear"/>
      <style:graphic-properties draw:stroke="dash" draw:stroke-dash="msLineDash_20_1" svg:stroke-width="0.053cm" svg:stroke-color="#4f81bd" svg:stroke-linecap="round"/>
    </style:style>
    <style:style style:name="ch12" style:family="chart">
      <style:chart-properties chart:regression-name="" chart:regression-max-degree="2" chart:regression-force-intercept="false" chart:regression-period="2" chart:regression-type="linear"/>
      <style:graphic-properties draw:stroke="dash" draw:stroke-dash="msLineDash_20_2" svg:stroke-width="0.053cm" svg:stroke-color="#ff0000" svg:stroke-linecap="round"/>
    </style:style>
    <style:style style:name="ch13" style:family="chart">
      <style:text-properties fo:color="#595959" style:text-position="0% 100%" fo:font-family="Calibri" fo:font-size="9pt" style:font-size-asian="9pt" style:font-size-complex="9pt"/>
    </style:style>
    <style:style style:name="ch14" style:family="chart">
      <style:graphic-properties draw:fill="none" draw:fill-color="#d9d9d9"/>
    </style:style>
    <style:style style:name="ch15" style:family="chart">
      <style:graphic-properties draw:fill-color="#d9d9d9"/>
    </style:style>
  </office:automatic-styles>
  <office:body>
    <office:chart>
      <chart:chart svg:width="13.43cm" svg:height="8.545cm" xlink:href=".." xlink:type="simple" chart:class="chart:scatter" chart:style-name="ch1">
        <chart:title svg:x="2.948cm" svg:y="0.306cm" chart:style-name="ch2">
          <text:p>Poblacion de Cuyes (unidades) Total</text:p>
        </chart:title>
        <chart:legend chart:legend-position="end" svg:x="7.817cm" svg:y="3.515cm" style:legend-expansion="high" chart:style-name="ch3"/>
        <chart:plot-area chart:style-name="ch4" table:cell-range-address="OFERTA.AB36:OFERTA.AC43" chart:data-source-has-labels="row" svg:x="1.408cm" svg:y="1.281cm" svg:width="11.681cm" svg:height="5.976cm">
          <chart:coordinate-region svg:x="2.779cm" svg:y="1.467cm" svg:width="10.23cm" svg:height="5.32cm"/>
          <chart:axis chart:dimension="x" chart:name="primary-x" chart:style-name="ch5">
            <chart:title svg:x="6.84cm" svg:y="7.428cm" chart:style-name="ch6">
              <text:p>Años</text:p>
            </chart:title>
            <chart:grid chart:style-name="ch7" chart:class="major"/>
          </chart:axis>
          <chart:axis chart:dimension="y" chart:name="primary-y" chart:style-name="ch8">
            <chart:title svg:x="0.531cm" svg:y="4.955cm" chart:style-name="ch9">
              <text:p>Cantidad</text:p>
            </chart:title>
            <chart:grid chart:style-name="ch7" chart:class="major"/>
          </chart:axis>
          <chart:series chart:style-name="ch10" chart:values-cell-range-address="OFERTA.AC36:OFERTA.AC43" loext:label-string="&quot;Poblacion de Cuyes&quot;" chart:class="chart:scatter">
            <chart:domain table:cell-range-address="OFERTA.AB36:OFERTA.AB43"/>
            <chart:regression-curve chart:style-name="ch11"/>
            <chart:regression-curve chart:style-name="ch12">
              <chart:equation chart:display-equation="true" chart:display-r-square="false" chart:style-name="ch13"/>
            </chart:regression-curve>
            <chart:data-point chart:repeated="8"/>
          </chart:series>
          <chart:wall chart:style-name="ch14"/>
          <chart:floor chart:style-name="ch15"/>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B</text:p>
              </table:table-cell>
              <table:table-cell office:value-type="string">
                <text:p>Poblacion de Cuyes</text:p>
              </table:table-cell>
            </table:table-row>
          </table:table-header-rows>
          <table:table-rows>
            <table:table-row>
              <table:table-cell office:value-type="string">
                <text:p>1</text:p>
              </table:table-cell>
              <table:table-cell office:value-type="float" office:value="1">
                <text:p>1</text:p>
                <draw:g>
                  <svg:desc>OFERTA.AB36:OFERTA.AB43</svg:desc>
                </draw:g>
              </table:table-cell>
              <table:table-cell office:value-type="float" office:value="13273.8">
                <text:p>13273.8</text:p>
                <draw:g>
                  <svg:desc>OFERTA.AC36:OFERTA.AC43</svg:desc>
                </draw:g>
              </table:table-cell>
            </table:table-row>
            <table:table-row>
              <table:table-cell office:value-type="string">
                <text:p>2</text:p>
              </table:table-cell>
              <table:table-cell office:value-type="float" office:value="2">
                <text:p>2</text:p>
              </table:table-cell>
              <table:table-cell office:value-type="float" office:value="12850.8">
                <text:p>12850.8</text:p>
              </table:table-cell>
            </table:table-row>
            <table:table-row>
              <table:table-cell office:value-type="string">
                <text:p>3</text:p>
              </table:table-cell>
              <table:table-cell office:value-type="float" office:value="3">
                <text:p>3</text:p>
              </table:table-cell>
              <table:table-cell office:value-type="float" office:value="14521.8">
                <text:p>14521.8</text:p>
              </table:table-cell>
            </table:table-row>
            <table:table-row>
              <table:table-cell office:value-type="string">
                <text:p>4</text:p>
              </table:table-cell>
              <table:table-cell office:value-type="float" office:value="4">
                <text:p>4</text:p>
              </table:table-cell>
              <table:table-cell office:value-type="float" office:value="14356.8">
                <text:p>14356.8</text:p>
              </table:table-cell>
            </table:table-row>
            <table:table-row>
              <table:table-cell office:value-type="string">
                <text:p>5</text:p>
              </table:table-cell>
              <table:table-cell office:value-type="float" office:value="5">
                <text:p>5</text:p>
              </table:table-cell>
              <table:table-cell office:value-type="float" office:value="15326.4">
                <text:p>15326.4</text:p>
              </table:table-cell>
            </table:table-row>
            <table:table-row>
              <table:table-cell office:value-type="string">
                <text:p>6</text:p>
              </table:table-cell>
              <table:table-cell office:value-type="float" office:value="6">
                <text:p>6</text:p>
              </table:table-cell>
              <table:table-cell office:value-type="float" office:value="15978">
                <text:p>15978</text:p>
              </table:table-cell>
            </table:table-row>
            <table:table-row>
              <table:table-cell office:value-type="string">
                <text:p>7</text:p>
              </table:table-cell>
              <table:table-cell office:value-type="float" office:value="7">
                <text:p>7</text:p>
              </table:table-cell>
              <table:table-cell office:value-type="float" office:value="14145.6">
                <text:p>14145.6</text:p>
              </table:table-cell>
            </table:table-row>
            <table:table-row>
              <table:table-cell office:value-type="string">
                <text:p>8</text:p>
              </table:table-cell>
              <table:table-cell office:value-type="float" office:value="8">
                <text:p>8</text:p>
              </table:table-cell>
              <table:table-cell office:value-type="float" office:value="13662.6">
                <text:p>13662.6</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4.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stroke-dash draw:name="msLineDash_20_1" draw:display-name="msLineDash 1" draw:style="round" draw:dots1="1" draw:dots1-length="1%" draw:distance="199%"/>
    <draw:stroke-dash draw:name="msLineDash_20_2" draw:display-name="msLineDash 2" draw:style="round" draw:dots1="1" draw:dots1-length="1%" draw:distance="199%"/>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35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5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35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5">
      <number:text loext:blank-width-char="("> </number:text>
      <number:text-content/>
      <number:text loext:blank-width-char=")"> </number:text>
      <style:map style:condition="value()&gt;0" style:apply-style-name="N135P0"/>
      <style:map style:condition="value()&lt;0" style:apply-style-name="N135P1"/>
      <style:map style:condition="value()=0" style:apply-style-name="N135P2"/>
    </number:text-style>
    <style:style style:name="ch1" style:family="chart">
      <style:graphic-properties draw:stroke="solid" svg:stroke-width="0.026cm" svg:stroke-color="#46aac4" draw:fill="gradient" draw:fill-gradient-name="msFillGradient_20_1"/>
    </style:style>
    <style:style style:name="ch2" style:family="chart">
      <style:chart-properties style:rotation-angle="0"/>
      <style:graphic-properties draw:fill="solid" draw:fill-color="#ffffff"/>
      <style:text-properties fo:color="#000000" style:text-position="0% 100%" fo:font-family="'Times New Roman'" style:font-family-generic="roman" fo:font-size="12pt" fo:language="es" fo:country="PE" fo:font-weight="bold" style:font-size-asian="12pt" style:font-weight-asian="bold" style:font-family-complex="'Times New Roman'" style:font-family-generic-complex="roman" style:font-size-complex="12pt" style:font-weight-complex="bold"/>
    </style:style>
    <style:style style:name="ch3" style:family="chart">
      <style:graphic-properties draw:stroke="none" svg:stroke-width="0.071cm" draw:fill="none" draw:fill-color="#d9d9d9"/>
      <style:text-properties fo:color="#000000" style:text-position="0% 100%" fo:font-family="'Times New Roman'" style:font-family-generic="roman" fo:font-size="10pt" style:font-size-asian="10pt" style:font-family-complex="'Times New Roman'" style:font-family-generic-complex="roman" style:font-size-complex="10pt"/>
    </style:style>
    <style:style style:name="ch4" style:family="chart">
      <style:chart-properties chart:include-hidden-cells="false" chart:treat-empty-cells="leave-gap" chart:series-source="rows"/>
    </style:style>
    <style:style style:name="ch5" style:family="chart" style:data-style-name="N0">
      <style:chart-properties chart:display-label="true" chart:tick-marks-major-inner="false" chart:tick-marks-major-outer="false" chart:logarithmic="false" chart:text-overlap="tru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000000" style:text-position="0% 100%" fo:font-family="'Times New Roman'" style:font-family-generic="roman" fo:font-size="10pt" style:font-size-asian="10pt" style:font-family-complex="'Times New Roman'" style:font-family-generic-complex="roman" style:font-size-complex="10pt"/>
    </style:style>
    <style:style style:name="ch6" style:family="chart">
      <style:graphic-properties svg:stroke-width="0.026cm" svg:stroke-color="#f2f2f2"/>
    </style:style>
    <style:style style:name="ch7" style:family="chart" style:data-style-name="N135">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26cm" svg:stroke-color="#b3b3b3"/>
      <style:text-properties fo:color="#000000" style:text-position="0% 100%" fo:font-family="'Times New Roman'" style:font-family-generic="roman" fo:font-size="10pt" style:font-size-asian="10pt" style:font-family-complex="'Times New Roman'" style:font-family-generic-complex="roman" style:font-size-complex="10pt"/>
    </style:style>
    <style:style style:name="ch8" style:family="chart">
      <style:graphic-properties svg:stroke-width="0.026cm" svg:stroke-color="#d9d9d9"/>
    </style:style>
    <style:style style:name="ch9" style:family="chart" style:data-style-name="N135">
      <style:chart-properties chart:symbol-type="none" chart:link-data-style-to-source="true" chart:label-position="right">
        <chart:label-separator>
          <text:p>; </text:p>
        </chart:label-separator>
      </style:chart-properties>
      <style:graphic-properties svg:stroke-width="0.079cm" svg:stroke-color="#002060" svg:stroke-linecap="round" draw:fill-color="#002060" fo:wrap-option="wrap"/>
      <style:text-properties fo:color="#000000" style:text-position="0% 100%" fo:font-family="'Times New Roman'" style:font-family-generic="roman" fo:font-size="10pt" style:font-size-asian="10pt" style:font-family-complex="'Times New Roman'" style:font-family-generic-complex="roman" style:font-size-complex="10pt"/>
    </style:style>
    <style:style style:name="ch10" style:family="chart" style:data-style-name="N135">
      <style:chart-properties chart:symbol-type="none" chart:link-data-style-to-source="true" chart:label-position="right">
        <chart:label-separator>
          <text:p>; </text:p>
        </chart:label-separator>
      </style:chart-properties>
      <style:graphic-properties svg:stroke-width="0.071cm" svg:stroke-color="#ff0000" draw:fill-color="#ff0000" fo:wrap-option="wrap"/>
      <style:text-properties fo:color="#000000" style:text-position="0% 100%" fo:font-family="'Times New Roman'" style:font-family-generic="roman" fo:font-size="10pt" style:font-size-asian="10pt" style:font-family-complex="'Times New Roman'" style:font-family-generic-complex="roman" style:font-size-complex="10pt"/>
    </style:style>
    <style:style style:name="ch11" style:family="chart" style:data-style-name="N135">
      <style:chart-properties chart:symbol-type="none" chart:link-data-style-to-source="true" chart:label-position="right">
        <chart:label-separator>
          <text:p>; </text:p>
        </chart:label-separator>
      </style:chart-properties>
      <style:graphic-properties svg:stroke-width="0.079cm" svg:stroke-color="#00b050" svg:stroke-linecap="round" draw:fill-color="#00b050" fo:wrap-option="wrap"/>
      <style:text-properties fo:color="#000000" style:text-position="0% 100%" fo:font-family="'Times New Roman'" style:font-family-generic="roman" fo:font-size="10pt" style:font-size-asian="10pt" style:font-family-complex="'Times New Roman'" style:font-family-generic-complex="roman" style:font-size-complex="10pt"/>
    </style:style>
    <style:style style:name="ch12" style:family="chart">
      <style:graphic-properties draw:stroke="solid" svg:stroke-width="0.026cm" svg:stroke-color="#7d5fa0" draw:fill="gradient" draw:fill-color="#d9d9d9" draw:fill-gradient-name="msFillGradient_20_2"/>
    </style:style>
    <style:style style:name="ch13" style:family="chart">
      <style:graphic-properties draw:fill-color="#d9d9d9"/>
    </style:style>
  </office:automatic-styles>
  <office:body>
    <office:chart>
      <chart:chart svg:width="14.06cm" svg:height="10.266cm" xlink:href=".." xlink:type="simple" chart:class="chart:line" chart:style-name="ch1">
        <chart:title svg:x="4.021cm" svg:y="0.216cm" chart:style-name="ch2">
          <text:p>GRAFICO DE PUNTO DE EQUILIBRIO</text:p>
        </chart:title>
        <chart:legend chart:legend-position="bottom" svg:x="1.135cm" svg:y="8.892cm" style:legend-expansion="custom" svg:width="12.394cm" svg:height="1.243cm" style:legend-expansion-aspect-ratio="9.97103781174578" chart:style-name="ch3"/>
        <chart:plot-area chart:style-name="ch4" table:cell-range-address="'ESTADO GyP'.I53:'ESTADO GyP'.N55" chart:data-source-has-labels="column" svg:x="0.339cm" svg:y="1.095cm" svg:width="13.041cm" svg:height="7.674cm">
          <chart:coordinate-region svg:x="2.398cm" svg:y="1.294cm" svg:width="10.982cm" svg:height="6.978cm"/>
          <chart:axis chart:dimension="x" chart:name="primary-x" chart:style-name="ch5">
            <chart:grid chart:style-name="ch6" chart:class="minor"/>
          </chart:axis>
          <chart:axis chart:dimension="y" chart:name="primary-y" chart:style-name="ch7">
            <chart:grid chart:style-name="ch8" chart:class="major"/>
          </chart:axis>
          <chart:series chart:style-name="ch9" chart:values-cell-range-address="'ESTADO GyP'.J53:'ESTADO GyP'.N53" chart:label-cell-address="'ESTADO GyP'.I53:'ESTADO GyP'.I53" chart:class="chart:line">
            <chart:data-point chart:repeated="5"/>
          </chart:series>
          <chart:series chart:style-name="ch10" chart:values-cell-range-address="'ESTADO GyP'.J54:'ESTADO GyP'.N54" chart:label-cell-address="'ESTADO GyP'.I54:'ESTADO GyP'.I54" chart:class="chart:line">
            <chart:data-point chart:repeated="5"/>
          </chart:series>
          <chart:series chart:style-name="ch11" chart:values-cell-range-address="'ESTADO GyP'.J55:'ESTADO GyP'.N55" chart:label-cell-address="'ESTADO GyP'.I55:'ESTADO GyP'.I55"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VENTAS</text:p>
                <draw:g>
                  <svg:desc>'ESTADO GyP'.I53:'ESTADO GyP'.I53</svg:desc>
                </draw:g>
              </table:table-cell>
              <table:table-cell office:value-type="float" office:value="57342.6795855458">
                <text:p>57342.6795855458</text:p>
                <draw:g>
                  <svg:desc>'ESTADO GyP'.J53:'ESTADO GyP'.N53</svg:desc>
                </draw:g>
              </table:table-cell>
              <table:table-cell office:value-type="float" office:value="263329.207585546">
                <text:p>263329.207585546</text:p>
              </table:table-cell>
              <table:table-cell office:value-type="float" office:value="469315.735585546">
                <text:p>469315.735585546</text:p>
              </table:table-cell>
              <table:table-cell office:value-type="float" office:value="675302.263585546">
                <text:p>675302.263585546</text:p>
              </table:table-cell>
              <table:table-cell office:value-type="float" office:value="950705.469551648">
                <text:p>950705.469551648</text:p>
              </table:table-cell>
            </table:table-row>
            <table:table-row>
              <table:table-cell office:value-type="string">
                <text:p>COSTOS TOTALES  ACUMULADOS</text:p>
                <draw:g>
                  <svg:desc>'ESTADO GyP'.I54:'ESTADO GyP'.I54</svg:desc>
                </draw:g>
              </table:table-cell>
              <table:table-cell office:value-type="float" office:value="205143.373885939">
                <text:p>205143.373885939</text:p>
                <draw:g>
                  <svg:desc>'ESTADO GyP'.J54:'ESTADO GyP'.N54</svg:desc>
                </draw:g>
              </table:table-cell>
              <table:table-cell office:value-type="float" office:value="335858.911919385">
                <text:p>335858.911919385</text:p>
              </table:table-cell>
              <table:table-cell office:value-type="float" office:value="466574.449952831">
                <text:p>466574.449952831</text:p>
              </table:table-cell>
              <table:table-cell office:value-type="float" office:value="597289.987986278">
                <text:p>597289.987986278</text:p>
              </table:table-cell>
              <table:table-cell office:value-type="float" office:value="728005.526019724">
                <text:p>728005.526019724</text:p>
              </table:table-cell>
            </table:table-row>
            <table:table-row>
              <table:table-cell office:value-type="string">
                <text:p>COSTOS FIJOS</text:p>
                <draw:g>
                  <svg:desc>'ESTADO GyP'.I55:'ESTADO GyP'.I55</svg:desc>
                </draw:g>
              </table:table-cell>
              <table:table-cell office:value-type="float" office:value="16538.7261899122">
                <text:p>16538.7261899122</text:p>
                <draw:g>
                  <svg:desc>'ESTADO GyP'.J55:'ESTADO GyP'.N55</svg:desc>
                </draw:g>
              </table:table-cell>
              <table:table-cell office:value-type="float" office:value="11149.8644067797">
                <text:p>11149.8644067797</text:p>
              </table:table-cell>
              <table:table-cell office:value-type="float" office:value="11149.8644067797">
                <text:p>11149.8644067797</text:p>
              </table:table-cell>
              <table:table-cell office:value-type="float" office:value="11149.8644067797">
                <text:p>11149.8644067797</text:p>
              </table:table-cell>
              <table:table-cell office:value-type="float" office:value="11149.8644067797">
                <text:p>11149.8644067797</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4.2$Linux_X86_64 LibreOffice_project/42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msFillGradient_20_1" draw:display-name="msFillGradient 1" draw:style="linear" draw:start-color="#a6e6ff" draw:end-color="#e6f7ff" draw:start-intensity="100%" draw:end-intensity="100%" draw:angle="180deg" draw:border="0%">
      <loext:gradient-stop svg:offset="0" loext:color-type="rgb" loext:color-value="#a6e6ff"/>
      <loext:gradient-stop svg:offset="0.35" loext:color-type="rgb" loext:color-value="#bfecff"/>
      <loext:gradient-stop svg:offset="1" loext:color-type="rgb" loext:color-value="#e6f7ff"/>
    </draw:gradient>
    <draw:gradient draw:name="msFillGradient_20_2" draw:display-name="msFillGradient 2" draw:style="linear" draw:start-color="#c8b3e9" draw:end-color="#f1eaf8" draw:start-intensity="100%" draw:end-intensity="100%" draw:angle="180deg" draw:border="0%">
      <loext:gradient-stop svg:offset="0" loext:color-type="rgb" loext:color-value="#c8b3e9"/>
      <loext:gradient-stop svg:offset="0.35" loext:color-type="rgb" loext:color-value="#d9caee"/>
      <loext:gradient-stop svg:offset="1" loext:color-type="rgb" loext:color-value="#f1eaf8"/>
    </draw:gradient>
  </office:styles>
</office:document-styles>
</file>