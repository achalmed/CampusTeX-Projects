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B000001F503236746.png" manifest:media-type="image/png"/>
  <manifest:file-entry manifest:full-path="Pictures/10000001000003350000010F5A10FF48.png" manifest:media-type="image/png"/>
  <manifest:file-entry manifest:full-path="Pictures/1000000100000335000000F6F0CE8C53.png" manifest:media-type="image/png"/>
  <manifest:file-entry manifest:full-path="Pictures/100000010000032C0000012DFB659817.png" manifest:media-type="image/png"/>
  <manifest:file-entry manifest:full-path="Pictures/10004B10000054CE00001BF5695ECEFB.emf" manifest:media-type="image/x-emf"/>
  <manifest:file-entry manifest:full-path="Pictures/100084A0000053F400001F1D87834C45.emf" manifest:media-type="image/x-emf"/>
  <manifest:file-entry manifest:full-path="Pictures/100000010000036D000001B479AF1D65.png" manifest:media-type="image/png"/>
  <manifest:file-entry manifest:full-path="Pictures/1000000000000096000000C0C694528C.jpg" manifest:media-type="image/jpeg"/>
  <manifest:file-entry manifest:full-path="Pictures/10000001000002F100000111EEF916BE.png" manifest:media-type="image/png"/>
  <manifest:file-entry manifest:full-path="Pictures/100036C4000054CE00001967F52D1832.emf" manifest:media-type="image/x-emf"/>
  <manifest:file-entry manifest:full-path="Pictures/10000001000000490000005009A20BFF.png" manifest:media-type="image/png"/>
  <manifest:file-entry manifest:full-path="Pictures/10000001000003260000026DFEB30525.png" manifest:media-type="image/png"/>
  <manifest:file-entry manifest:full-path="Pictures/100137500000640300008EAD7D173906.emf" manifest:media-type="image/x-emf"/>
  <manifest:file-entry manifest:full-path="Pictures/10000001000003760000007F8196553F.png" manifest:media-type="image/png"/>
  <manifest:file-entry manifest:full-path="Pictures/10000001000002500000034C516FC52C.png" manifest:media-type="image/png"/>
  <manifest:file-entry manifest:full-path="Pictures/10009F8C0000541300002550AF479BDD.emf" manifest:media-type="image/x-emf"/>
  <manifest:file-entry manifest:full-path="Pictures/100000010000032D000001699604FF7D.png" manifest:media-type="image/png"/>
  <manifest:file-entry manifest:full-path="Pictures/10006F6400004DDE00001C3399EA311B.emf" manifest:media-type="image/x-emf"/>
  <manifest:file-entry manifest:full-path="Pictures/1000B1FC00006460000033C6F6900539.emf" manifest:media-type="image/x-emf"/>
  <manifest:file-entry manifest:full-path="Pictures/10000001000000E9000000BF1267B552.png" manifest:media-type="image/png"/>
  <manifest:file-entry manifest:full-path="Pictures/10009580000053F40000220894C0D6D5.emf" manifest:media-type="image/x-emf"/>
  <manifest:file-entry manifest:full-path="Pictures/10008A4800005AA500002D17EC7B20F2.emf" manifest:media-type="image/x-emf"/>
  <manifest:file-entry manifest:full-path="Pictures/100000010000032C00000149149420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office:font-face-decls>
  <office:automatic-styles>
    <style:style style:name="Tabla1" style:family="table">
      <style:table-properties style:rel-width="100%" fo:margin-left="-0.123cm" fo:margin-top="0cm" fo:margin-bottom="0cm" table:align="left" style:writing-mode="page"/>
    </style:style>
    <style:style style:name="Tabla1.A" style:family="table-column">
      <style:table-column-properties style:rel-column-width="10426*"/>
    </style:style>
    <style:style style:name="Tabla1.B" style:family="table-column">
      <style:table-column-properties style:rel-column-width="52697*"/>
    </style:style>
    <style:style style:name="Tabla1.C" style:family="table-column">
      <style:table-column-properties style:rel-column-width="1206*"/>
    </style:style>
    <style:style style:name="Tabla1.D" style:family="table-column">
      <style:table-column-properties style:rel-column-width="1203*"/>
    </style:style>
    <style:style style:name="Tabla1.1" style:family="table-row">
      <style:table-row-properties style:min-row-height="0.582cm" fo:keep-together="auto"/>
    </style:style>
    <style:style style:name="Tabla1.A1" style:family="table-cell">
      <style:table-cell-properties style:vertical-align="bottom" fo:background-color="transparent" fo:padding-left="0.123cm" fo:padding-right="0.123cm" fo:padding-top="0cm" fo:padding-bottom="0cm" fo:border="none">
        <style:background-image/>
      </style:table-cell-properties>
    </style:style>
    <style:style style:name="Tabla1.B1" style:family="table-cell">
      <style:table-cell-properties style:vertical-align="bottom" fo:background-color="transparent" fo:padding-left="0.123cm" fo:padding-right="0.123cm" fo:padding-top="0cm" fo:padding-bottom="0cm" fo:border-left="0.5pt solid #000000" fo:border-right="none" fo:border-top="0.5pt solid #000000" fo:border-bottom="0.5pt solid #000000">
        <style:background-image/>
      </style:table-cell-properties>
    </style:style>
    <style:style style:name="Tabla1.C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a1.D1"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1.2" style:family="table-row">
      <style:table-row-properties style:row-height="0.238cm" fo:keep-together="auto"/>
    </style:style>
    <style:style style:name="Tabla2" style:family="table">
      <style:table-properties style:rel-width="100%" fo:margin-left="-0.191cm" fo:margin-top="0cm" fo:margin-bottom="0cm" table:align="left" style:writing-mode="page"/>
    </style:style>
    <style:style style:name="Tabla2.A" style:family="table-column">
      <style:table-column-properties style:rel-column-width="23769*"/>
    </style:style>
    <style:style style:name="Tabla2.B" style:family="table-column">
      <style:table-column-properties style:rel-column-width="16613*"/>
    </style:style>
    <style:style style:name="Tabla2.C" style:family="table-column">
      <style:table-column-properties style:rel-column-width="25153*"/>
    </style:style>
    <style:style style:name="Tabla2.1" style:family="table-row">
      <style:table-row-properties style:min-row-height="0.787cm" fo:keep-together="auto"/>
    </style:style>
    <style:style style:name="Tabla2.A1" style:family="table-cell">
      <style:table-cell-properties style:vertical-align="middle" fo:padding-left="0.191cm" fo:padding-right="0.191cm" fo:padding-top="0cm" fo:padding-bottom="0cm" fo:border="0.5pt solid #000000"/>
    </style:style>
    <style:style style:name="Tabla2.2" style:family="table-row">
      <style:table-row-properties style:min-row-height="0.836cm" fo:keep-together="auto"/>
    </style:style>
    <style:style style:name="Tabla3" style:family="table">
      <style:table-properties style:rel-width="100%" fo:margin-left="-0.123cm" fo:margin-top="0cm" fo:margin-bottom="0cm" table:align="left" style:writing-mode="page"/>
    </style:style>
    <style:style style:name="Tabla3.A" style:family="table-column">
      <style:table-column-properties style:rel-column-width="65535*"/>
    </style:style>
    <style:style style:name="Tabla3.1" style:family="table-row">
      <style:table-row-properties style:min-row-height="0.446cm" fo:keep-together="auto"/>
    </style:style>
    <style:style style:name="Tabla3.A1" style:family="table-cell">
      <style:table-cell-properties style:vertical-align="middle" fo:padding-left="0.123cm" fo:padding-right="0.123cm" fo:padding-top="0cm" fo:padding-bottom="0cm" fo:border="0.5pt solid #000000"/>
    </style:style>
    <style:style style:name="Tabla4" style:family="table">
      <style:table-properties style:rel-width="100%" fo:margin-left="-0.123cm" fo:margin-top="0cm" fo:margin-bottom="0cm" table:align="left" style:writing-mode="page"/>
    </style:style>
    <style:style style:name="Tabla4.A" style:family="table-column">
      <style:table-column-properties style:rel-column-width="65535*"/>
    </style:style>
    <style:style style:name="Tabla4.1" style:family="table-row">
      <style:table-row-properties style:min-row-height="0.898cm" fo:keep-together="auto"/>
    </style:style>
    <style:style style:name="Tabla4.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4.2" style:family="table-row">
      <style:table-row-properties style:min-row-height="0.545cm" fo:keep-together="auto"/>
    </style:style>
    <style:style style:name="Tabla4.A2" style:family="table-cell">
      <style:table-cell-properties style:vertical-align="middle" fo:padding-left="0.123cm" fo:padding-right="0.123cm" fo:padding-top="0cm" fo:padding-bottom="0cm" fo:border="0.5pt solid #000000"/>
    </style:style>
    <style:style style:name="Tabla5" style:family="table">
      <style:table-properties style:rel-width="100%" fo:margin-left="-0.123cm" fo:margin-top="0cm" fo:margin-bottom="0cm" table:align="left" style:writing-mode="page"/>
    </style:style>
    <style:style style:name="Tabla5.A" style:family="table-column">
      <style:table-column-properties style:rel-column-width="65535*"/>
    </style:style>
    <style:style style:name="Tabla5.1" style:family="table-row">
      <style:table-row-properties style:min-row-height="0.898cm" fo:keep-together="auto"/>
    </style:style>
    <style:style style:name="Tabla5.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5.2" style:family="table-row">
      <style:table-row-properties style:min-row-height="0.545cm" fo:keep-together="auto"/>
    </style:style>
    <style:style style:name="Tabla5.A2" style:family="table-cell">
      <style:table-cell-properties style:vertical-align="middle" fo:padding-left="0.123cm" fo:padding-right="0.123cm" fo:padding-top="0cm" fo:padding-bottom="0cm" fo:border="0.5pt solid #000000"/>
    </style:style>
    <style:style style:name="Tabla6" style:family="table">
      <style:table-properties style:rel-width="100%" fo:margin-left="-0.191cm" fo:margin-top="0cm" fo:margin-bottom="0cm" table:align="left" style:writing-mode="page"/>
    </style:style>
    <style:style style:name="Tabla6.A" style:family="table-column">
      <style:table-column-properties style:rel-column-width="13723*"/>
    </style:style>
    <style:style style:name="Tabla6.B" style:family="table-column">
      <style:table-column-properties style:rel-column-width="51811*"/>
    </style:style>
    <style:style style:name="Tabla6.1" style:family="table-row">
      <style:table-row-properties style:min-row-height="0.106cm" fo:keep-together="auto"/>
    </style:style>
    <style:style style:name="Tabla6.A1" style:family="table-cell">
      <style:table-cell-properties style:vertical-align="middle" fo:padding-left="0.191cm" fo:padding-right="0.191cm" fo:padding-top="0cm" fo:padding-bottom="0cm" fo:border="0.5pt solid #000000"/>
    </style:style>
    <style:style style:name="Tabla7" style:family="table">
      <style:table-properties style:rel-width="100%" fo:margin-left="-0.191cm" fo:margin-top="0cm" fo:margin-bottom="0cm" table:align="left" style:writing-mode="page"/>
    </style:style>
    <style:style style:name="Tabla7.A" style:family="table-column">
      <style:table-column-properties style:rel-column-width="65535*"/>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8" style:family="table">
      <style:table-properties style:rel-width="100%" fo:margin-left="-0.191cm" fo:margin-top="0cm" fo:margin-bottom="0cm" table:align="left" style:writing-mode="page"/>
    </style:style>
    <style:style style:name="Tabla8.A" style:family="table-column">
      <style:table-column-properties style:rel-column-width="65535*"/>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9" style:family="table">
      <style:table-properties style:rel-width="100%" fo:margin-left="-0.191cm" fo:margin-top="0cm" fo:margin-bottom="0cm" table:align="left" style:writing-mode="page"/>
    </style:style>
    <style:style style:name="Tabla9.A" style:family="table-column">
      <style:table-column-properties style:rel-column-width="65535*"/>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0" style:family="table">
      <style:table-properties style:rel-width="100%" fo:margin-left="-0.123cm" fo:margin-top="0cm" fo:margin-bottom="0cm" table:align="left" style:writing-mode="page"/>
    </style:style>
    <style:style style:name="Tabla10.A" style:family="table-column">
      <style:table-column-properties style:rel-column-width="11173*"/>
    </style:style>
    <style:style style:name="Tabla10.B" style:family="table-column">
      <style:table-column-properties style:rel-column-width="9785*"/>
    </style:style>
    <style:style style:name="Tabla10.C" style:family="table-column">
      <style:table-column-properties style:rel-column-width="44577*"/>
    </style:style>
    <style:style style:name="Tabla10.1" style:family="table-row">
      <style:table-row-properties style:min-row-height="0.598cm" fo:keep-together="auto"/>
    </style:style>
    <style:style style:name="Tabla10.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11" style:family="table">
      <style:table-properties style:rel-width="100%" fo:margin-left="-0.191cm" fo:margin-top="0cm" fo:margin-bottom="0cm" table:align="left" style:writing-mode="page"/>
    </style:style>
    <style:style style:name="Tabla11.A" style:family="table-column">
      <style:table-column-properties style:rel-column-width="65535*"/>
    </style:style>
    <style:style style:name="Tabla11.1" style:family="table-row">
      <style:table-row-properties style:min-row-height="1.633cm" fo:keep-together="auto"/>
    </style:style>
    <style:style style:name="Tabla11.A1" style:family="table-cell">
      <style:table-cell-properties fo:padding-left="0.191cm" fo:padding-right="0.191cm" fo:padding-top="0cm" fo:padding-bottom="0cm" fo:border="0.5pt solid #000000"/>
    </style:style>
    <style:style style:name="Tabla12" style:family="table">
      <style:table-properties style:rel-width="100%" fo:margin-left="-0.191cm" fo:margin-top="0cm" fo:margin-bottom="0cm" table:align="left" style:writing-mode="page"/>
    </style:style>
    <style:style style:name="Tabla12.A" style:family="table-column">
      <style:table-column-properties style:rel-column-width="65535*"/>
    </style:style>
    <style:style style:name="Tabla12.1" style:family="table-row">
      <style:table-row-properties style:min-row-height="1.362cm" fo:keep-together="auto"/>
    </style:style>
    <style:style style:name="Tabla12.A1" style:family="table-cell">
      <style:table-cell-properties fo:padding-left="0.191cm" fo:padding-right="0.191cm" fo:padding-top="0cm" fo:padding-bottom="0cm" fo:border="0.5pt solid #000000"/>
    </style:style>
    <style:style style:name="Tabla13" style:family="table">
      <style:table-properties style:rel-width="100%" fo:margin-left="-0.123cm" fo:margin-top="0cm" fo:margin-bottom="0cm" table:align="left" style:writing-mode="page"/>
    </style:style>
    <style:style style:name="Tabla13.A" style:family="table-column">
      <style:table-column-properties style:rel-column-width="65535*"/>
    </style:style>
    <style:style style:name="Tabla13.1" style:family="table-row">
      <style:table-row-properties style:min-row-height="0.711cm" fo:keep-together="auto"/>
    </style:style>
    <style:style style:name="Tabla13.A1" style:family="table-cell">
      <style:table-cell-properties style:vertical-align="middle" fo:padding-left="0.123cm" fo:padding-right="0.123cm" fo:padding-top="0cm" fo:padding-bottom="0cm" fo:border="0.5pt solid #000000"/>
    </style:style>
    <style:style style:name="Tabla14" style:family="table">
      <style:table-properties style:rel-width="100%" fo:margin-left="-0.191cm" fo:margin-top="0cm" fo:margin-bottom="0cm" table:align="left" style:writing-mode="page"/>
    </style:style>
    <style:style style:name="Tabla14.A" style:family="table-column">
      <style:table-column-properties style:rel-column-width="21154*"/>
    </style:style>
    <style:style style:name="Tabla14.B" style:family="table-column">
      <style:table-column-properties style:rel-column-width="44380*"/>
    </style:style>
    <style:style style:name="Tabla14.1" style:family="table-row">
      <style:table-row-properties style:min-row-height="0.711cm" fo:keep-together="auto"/>
    </style:style>
    <style:style style:name="Tabla14.A1" style:family="table-cell">
      <style:table-cell-properties style:vertical-align="middle" fo:padding-left="0.191cm" fo:padding-right="0.191cm" fo:padding-top="0cm" fo:padding-bottom="0cm" fo:border="0.5pt solid #000000"/>
    </style:style>
    <style:style style:name="Tabla14.2" style:family="table-row">
      <style:table-row-properties style:min-row-height="0.663cm" fo:keep-together="auto"/>
    </style:style>
    <style:style style:name="Tabla15" style:family="table">
      <style:table-properties style:width="15.249cm" fo:margin-left="-0.191cm" fo:margin-top="0cm" fo:margin-bottom="0cm" table:align="left" style:writing-mode="lr-tb"/>
    </style:style>
    <style:style style:name="Tabla15.A" style:family="table-column">
      <style:table-column-properties style:column-width="3.812cm"/>
    </style:style>
    <style:style style:name="Tabla15.1" style:family="table-row">
      <style:table-row-properties fo:keep-together="auto"/>
    </style:style>
    <style:style style:name="Tabla15.A1" style:family="table-cell">
      <style:table-cell-properties style:vertical-align="middle" fo:background-color="#daeef3" fo:padding-left="0.191cm" fo:padding-right="0.191cm" fo:padding-top="0cm" fo:padding-bottom="0cm" fo:border="0.5pt solid #000000" style:writing-mode="lr-tb">
        <style:background-image/>
      </style:table-cell-properties>
    </style:style>
    <style:style style:name="Tabla15.A2" style:family="table-cell">
      <style:table-cell-properties fo:padding-left="0.191cm" fo:padding-right="0.191cm" fo:padding-top="0cm" fo:padding-bottom="0cm" fo:border="0.5pt solid #000000" style:writing-mode="lr-tb"/>
    </style:style>
    <style:style style:name="Tabla15.B2" style:family="table-cell">
      <style:table-cell-properties fo:padding-left="0.191cm" fo:padding-right="0.191cm" fo:padding-top="0cm" fo:padding-bottom="0cm" fo:border="0.5pt solid #000000" style:writing-mode="lr-tb"/>
    </style:style>
    <style:style style:name="Tabla15.C2" style:family="table-cell">
      <style:table-cell-properties fo:padding-left="0.191cm" fo:padding-right="0.191cm" fo:padding-top="0cm" fo:padding-bottom="0cm" fo:border="0.5pt solid #000000" style:writing-mode="lr-tb"/>
    </style:style>
    <style:style style:name="Tabla15.D2" style:family="table-cell">
      <style:table-cell-properties fo:padding-left="0.191cm" fo:padding-right="0.191cm" fo:padding-top="0cm" fo:padding-bottom="0cm" fo:border="0.5pt solid #000000" style:writing-mode="lr-tb"/>
    </style:style>
    <style:style style:name="Tabla15.A3" style:family="table-cell">
      <style:table-cell-properties fo:padding-left="0.191cm" fo:padding-right="0.191cm" fo:padding-top="0cm" fo:padding-bottom="0cm" fo:border="0.5pt solid #000000" style:writing-mode="lr-tb"/>
    </style:style>
    <style:style style:name="Tabla15.B3" style:family="table-cell">
      <style:table-cell-properties fo:padding-left="0.191cm" fo:padding-right="0.191cm" fo:padding-top="0cm" fo:padding-bottom="0cm" fo:border="0.5pt solid #000000" style:writing-mode="lr-tb"/>
    </style:style>
    <style:style style:name="Tabla15.C3" style:family="table-cell">
      <style:table-cell-properties fo:padding-left="0.191cm" fo:padding-right="0.191cm" fo:padding-top="0cm" fo:padding-bottom="0cm" fo:border="0.5pt solid #000000" style:writing-mode="lr-tb"/>
    </style:style>
    <style:style style:name="Tabla15.D3" style:family="table-cell">
      <style:table-cell-properties fo:padding-left="0.191cm" fo:padding-right="0.191cm" fo:padding-top="0cm" fo:padding-bottom="0cm" fo:border="0.5pt solid #000000" style:writing-mode="lr-tb"/>
    </style:style>
    <style:style style:name="Tabla15.A4" style:family="table-cell">
      <style:table-cell-properties fo:padding-left="0.191cm" fo:padding-right="0.191cm" fo:padding-top="0cm" fo:padding-bottom="0cm" fo:border="0.5pt solid #000000" style:writing-mode="lr-tb"/>
    </style:style>
    <style:style style:name="Tabla15.B4" style:family="table-cell">
      <style:table-cell-properties fo:padding-left="0.191cm" fo:padding-right="0.191cm" fo:padding-top="0cm" fo:padding-bottom="0cm" fo:border="0.5pt solid #000000" style:writing-mode="lr-tb"/>
    </style:style>
    <style:style style:name="Tabla15.C4" style:family="table-cell">
      <style:table-cell-properties fo:padding-left="0.191cm" fo:padding-right="0.191cm" fo:padding-top="0cm" fo:padding-bottom="0cm" fo:border="0.5pt solid #000000" style:writing-mode="lr-tb"/>
    </style:style>
    <style:style style:name="Tabla15.D4" style:family="table-cell">
      <style:table-cell-properties fo:padding-left="0.191cm" fo:padding-right="0.191cm" fo:padding-top="0cm" fo:padding-bottom="0cm" fo:border="0.5pt solid #000000" style:writing-mode="lr-tb"/>
    </style:style>
    <style:style style:name="Tabla15.A5" style:family="table-cell">
      <style:table-cell-properties fo:padding-left="0.191cm" fo:padding-right="0.191cm" fo:padding-top="0cm" fo:padding-bottom="0cm" fo:border="0.5pt solid #000000" style:writing-mode="lr-tb"/>
    </style:style>
    <style:style style:name="Tabla15.B5" style:family="table-cell">
      <style:table-cell-properties fo:padding-left="0.191cm" fo:padding-right="0.191cm" fo:padding-top="0cm" fo:padding-bottom="0cm" fo:border="0.5pt solid #000000" style:writing-mode="lr-tb"/>
    </style:style>
    <style:style style:name="Tabla15.C5" style:family="table-cell">
      <style:table-cell-properties fo:padding-left="0.191cm" fo:padding-right="0.191cm" fo:padding-top="0cm" fo:padding-bottom="0cm" fo:border="0.5pt solid #000000" style:writing-mode="lr-tb"/>
    </style:style>
    <style:style style:name="Tabla15.D5" style:family="table-cell">
      <style:table-cell-properties fo:padding-left="0.191cm" fo:padding-right="0.191cm" fo:padding-top="0cm" fo:padding-bottom="0cm" fo:border="0.5pt solid #000000" style:writing-mode="lr-tb"/>
    </style:style>
    <style:style style:name="Tabla15.A6" style:family="table-cell">
      <style:table-cell-properties fo:padding-left="0.191cm" fo:padding-right="0.191cm" fo:padding-top="0cm" fo:padding-bottom="0cm" fo:border="0.5pt solid #000000" style:writing-mode="lr-tb"/>
    </style:style>
    <style:style style:name="Tabla15.B6" style:family="table-cell">
      <style:table-cell-properties fo:padding-left="0.191cm" fo:padding-right="0.191cm" fo:padding-top="0cm" fo:padding-bottom="0cm" fo:border="0.5pt solid #000000" style:writing-mode="lr-tb"/>
    </style:style>
    <style:style style:name="Tabla15.C6" style:family="table-cell">
      <style:table-cell-properties fo:padding-left="0.191cm" fo:padding-right="0.191cm" fo:padding-top="0cm" fo:padding-bottom="0cm" fo:border="0.5pt solid #000000" style:writing-mode="lr-tb"/>
    </style:style>
    <style:style style:name="Tabla15.D6" style:family="table-cell">
      <style:table-cell-properties fo:padding-left="0.191cm" fo:padding-right="0.191cm" fo:padding-top="0cm" fo:padding-bottom="0cm" fo:border="0.5pt solid #000000" style:writing-mode="lr-tb"/>
    </style:style>
    <style:style style:name="Tabla15.A7" style:family="table-cell">
      <style:table-cell-properties fo:padding-left="0.191cm" fo:padding-right="0.191cm" fo:padding-top="0cm" fo:padding-bottom="0cm" fo:border="0.5pt solid #000000" style:writing-mode="lr-tb"/>
    </style:style>
    <style:style style:name="Tabla15.B7" style:family="table-cell">
      <style:table-cell-properties fo:padding-left="0.191cm" fo:padding-right="0.191cm" fo:padding-top="0cm" fo:padding-bottom="0cm" fo:border="0.5pt solid #000000" style:writing-mode="lr-tb"/>
    </style:style>
    <style:style style:name="Tabla15.C7" style:family="table-cell">
      <style:table-cell-properties fo:padding-left="0.191cm" fo:padding-right="0.191cm" fo:padding-top="0cm" fo:padding-bottom="0cm" fo:border="0.5pt solid #000000" style:writing-mode="lr-tb"/>
    </style:style>
    <style:style style:name="Tabla15.D7" style:family="table-cell">
      <style:table-cell-properties fo:padding-left="0.191cm" fo:padding-right="0.191cm" fo:padding-top="0cm" fo:padding-bottom="0cm" fo:border="0.5pt solid #000000" style:writing-mode="lr-tb"/>
    </style:style>
    <style:style style:name="Tabla15.A8" style:family="table-cell">
      <style:table-cell-properties style:vertical-align="middle" fo:padding-left="0.191cm" fo:padding-right="0.191cm" fo:padding-top="0cm" fo:padding-bottom="0cm" fo:border="0.5pt solid #000000" style:writing-mode="lr-tb"/>
    </style:style>
    <style:style style:name="Tabla15.B8" style:family="table-cell">
      <style:table-cell-properties style:vertical-align="middle" fo:padding-left="0.191cm" fo:padding-right="0.191cm" fo:padding-top="0cm" fo:padding-bottom="0cm" fo:border="0.5pt solid #000000" style:writing-mode="lr-tb"/>
    </style:style>
    <style:style style:name="Tabla15.C8" style:family="table-cell">
      <style:table-cell-properties fo:padding-left="0.191cm" fo:padding-right="0.191cm" fo:padding-top="0cm" fo:padding-bottom="0cm" fo:border="0.5pt solid #000000" style:writing-mode="lr-tb"/>
    </style:style>
    <style:style style:name="Tabla15.D8" style:family="table-cell">
      <style:table-cell-properties fo:padding-left="0.191cm" fo:padding-right="0.191cm" fo:padding-top="0cm" fo:padding-bottom="0cm" fo:border="0.5pt solid #000000" style:writing-mode="lr-tb"/>
    </style:style>
    <style:style style:name="Tabla15.A9" style:family="table-cell">
      <style:table-cell-properties style:vertical-align="middle" fo:padding-left="0.191cm" fo:padding-right="0.191cm" fo:padding-top="0cm" fo:padding-bottom="0cm" fo:border="0.5pt solid #000000" style:writing-mode="lr-tb"/>
    </style:style>
    <style:style style:name="Tabla15.B9" style:family="table-cell">
      <style:table-cell-properties style:vertical-align="middle" fo:padding-left="0.191cm" fo:padding-right="0.191cm" fo:padding-top="0cm" fo:padding-bottom="0cm" fo:border="0.5pt solid #000000" style:writing-mode="lr-tb"/>
    </style:style>
    <style:style style:name="Tabla15.C9" style:family="table-cell">
      <style:table-cell-properties fo:padding-left="0.191cm" fo:padding-right="0.191cm" fo:padding-top="0cm" fo:padding-bottom="0cm" fo:border="0.5pt solid #000000" style:writing-mode="lr-tb"/>
    </style:style>
    <style:style style:name="Tabla15.D9" style:family="table-cell">
      <style:table-cell-properties style:vertical-align="middle" fo:padding-left="0.191cm" fo:padding-right="0.191cm" fo:padding-top="0cm" fo:padding-bottom="0cm" fo:border="0.5pt solid #000000" style:writing-mode="lr-tb"/>
    </style:style>
    <style:style style:name="Tabla16" style:family="table">
      <style:table-properties style:rel-width="100%" fo:margin-left="-0.191cm" fo:margin-top="0cm" fo:margin-bottom="0cm" table:align="left" style:writing-mode="page"/>
    </style:style>
    <style:style style:name="Tabla16.A" style:family="table-column">
      <style:table-column-properties style:rel-column-width="65535*"/>
    </style:style>
    <style:style style:name="Tabla16.1" style:family="table-row">
      <style:table-row-properties style:min-row-height="7.375cm" fo:keep-together="auto"/>
    </style:style>
    <style:style style:name="Tabla16.A1" style:family="table-cell">
      <style:table-cell-properties fo:padding-left="0.191cm" fo:padding-right="0.191cm" fo:padding-top="0cm" fo:padding-bottom="0cm" fo:border="0.5pt solid #000000"/>
    </style:style>
    <style:style style:name="Tabla17" style:family="table">
      <style:table-properties style:width="7.022cm" fo:margin-top="0cm" fo:margin-bottom="0cm" table:align="center" style:writing-mode="page"/>
    </style:style>
    <style:style style:name="Tabla17.A" style:family="table-column">
      <style:table-column-properties style:column-width="1.288cm"/>
    </style:style>
    <style:style style:name="Tabla17.B" style:family="table-column">
      <style:table-column-properties style:column-width="5.733cm"/>
    </style:style>
    <style:style style:name="Tabla17.1" style:family="table-row">
      <style:table-row-properties style:min-row-height="1.06cm" fo:keep-together="auto"/>
    </style:style>
    <style:style style:name="Tabla17.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17.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17.2" style:family="table-row">
      <style:table-row-properties style:min-row-height="0.54cm" fo:keep-together="auto"/>
    </style:style>
    <style:style style:name="Tabla17.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17.B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18" style:family="table">
      <style:table-properties style:rel-width="100%" fo:margin-left="-0.123cm" fo:margin-top="0cm" fo:margin-bottom="0cm" table:align="left" style:writing-mode="page"/>
    </style:style>
    <style:style style:name="Tabla18.A" style:family="table-column">
      <style:table-column-properties style:rel-column-width="65535*"/>
    </style:style>
    <style:style style:name="Tabla18.1" style:family="table-row">
      <style:table-row-properties style:min-row-height="0.582cm" fo:keep-together="auto"/>
    </style:style>
    <style:style style:name="Tabla18.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18.A2" style:family="table-cell">
      <style:table-cell-properties style:vertical-align="middle" fo:padding-left="0.123cm" fo:padding-right="0.123cm" fo:padding-top="0cm" fo:padding-bottom="0cm" fo:border="0.5pt solid #000000"/>
    </style:style>
    <style:style style:name="Tabla18.A3" style:family="table-cell">
      <style:table-cell-properties style:vertical-align="middle" fo:padding-left="0.123cm" fo:padding-right="0.123cm" fo:padding-top="0cm" fo:padding-bottom="0cm" fo:border="0.5pt solid #000000"/>
    </style:style>
    <style:style style:name="Tabla19" style:family="table">
      <style:table-properties style:rel-width="100%" fo:margin-left="-0.123cm" fo:margin-top="0cm" fo:margin-bottom="0cm" table:align="left" style:writing-mode="page"/>
    </style:style>
    <style:style style:name="Tabla19.A" style:family="table-column">
      <style:table-column-properties style:rel-column-width="21718*"/>
    </style:style>
    <style:style style:name="Tabla19.B" style:family="table-column">
      <style:table-column-properties style:rel-column-width="43816*"/>
    </style:style>
    <style:style style:name="Tabla19.1" style:family="table-row">
      <style:table-row-properties style:min-row-height="0.362cm" fo:keep-together="auto"/>
    </style:style>
    <style:style style:name="Tabla19.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19.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19.2" style:family="table-row">
      <style:table-row-properties style:min-row-height="0.605cm" fo:keep-together="auto"/>
    </style:style>
    <style:style style:name="Tabla19.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19.B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19.B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0" style:family="table">
      <style:table-properties style:rel-width="100%" fo:margin-left="-0.123cm" fo:margin-top="0cm" fo:margin-bottom="0cm" table:align="left" style:writing-mode="page"/>
    </style:style>
    <style:style style:name="Tabla20.A" style:family="table-column">
      <style:table-column-properties style:rel-column-width="15531*"/>
    </style:style>
    <style:style style:name="Tabla20.B" style:family="table-column">
      <style:table-column-properties style:rel-column-width="14444*"/>
    </style:style>
    <style:style style:name="Tabla20.C" style:family="table-column">
      <style:table-column-properties style:rel-column-width="13540*"/>
    </style:style>
    <style:style style:name="Tabla20.D" style:family="table-column">
      <style:table-column-properties style:rel-column-width="22017*"/>
    </style:style>
    <style:style style:name="Tabla20.1" style:family="table-row">
      <style:table-row-properties style:min-row-height="0.568cm" fo:keep-together="auto"/>
    </style:style>
    <style:style style:name="Tabla20.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0.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0.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0.B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0.C2"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20.C3"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1" style:family="table">
      <style:table-properties style:rel-width="100%" fo:margin-left="-0.191cm" fo:margin-top="0cm" fo:margin-bottom="0cm" table:align="left" style:writing-mode="page"/>
    </style:style>
    <style:style style:name="Tabla21.A" style:family="table-column">
      <style:table-column-properties style:rel-column-width="19437*"/>
    </style:style>
    <style:style style:name="Tabla21.B" style:family="table-column">
      <style:table-column-properties style:rel-column-width="46097*"/>
    </style:style>
    <style:style style:name="Tabla21.1" style:family="table-row">
      <style:table-row-properties style:min-row-height="0.568cm" fo:keep-together="auto"/>
    </style:style>
    <style:style style:name="Tabla21.A1" style:family="table-cell">
      <style:table-cell-properties style:vertical-align="middle" fo:padding-left="0.191cm" fo:padding-right="0.191cm" fo:padding-top="0cm" fo:padding-bottom="0cm" fo:border="0.5pt solid #000000"/>
    </style:style>
    <style:style style:name="Tabla21.3" style:family="table-row">
      <style:table-row-properties style:min-row-height="0.601cm" fo:keep-together="auto"/>
    </style:style>
    <style:style style:name="Tabla21.4" style:family="table-row">
      <style:table-row-properties style:min-row-height="0.533cm" fo:keep-together="auto"/>
    </style:style>
    <style:style style:name="Tabla22" style:family="table">
      <style:table-properties style:rel-width="100%" fo:margin-left="-0.191cm" fo:margin-top="0cm" fo:margin-bottom="0cm" table:align="left" style:writing-mode="page"/>
    </style:style>
    <style:style style:name="Tabla22.A" style:family="table-column">
      <style:table-column-properties style:rel-column-width="65535*"/>
    </style:style>
    <style:style style:name="Tabla22.1" style:family="table-row">
      <style:table-row-properties style:min-row-height="2.277cm" fo:keep-together="auto"/>
    </style:style>
    <style:style style:name="Tabla22.A1" style:family="table-cell">
      <style:table-cell-properties fo:padding-left="0.191cm" fo:padding-right="0.191cm" fo:padding-top="0cm" fo:padding-bottom="0cm" fo:border="0.5pt solid #000000"/>
    </style:style>
    <style:style style:name="Tabla23" style:family="table">
      <style:table-properties style:width="14.817cm" fo:margin-left="-0.026cm" fo:margin-top="0cm" fo:margin-bottom="0cm" table:align="left" style:writing-mode="page"/>
    </style:style>
    <style:style style:name="Tabla23.A" style:family="table-column">
      <style:table-column-properties style:column-width="14.817cm"/>
    </style:style>
    <style:style style:name="Tabla23.1" style:family="table-row">
      <style:table-row-properties style:min-row-height="0.582cm" fo:keep-together="auto"/>
    </style:style>
    <style:style style:name="Tabla23.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4" style:family="table">
      <style:table-properties style:rel-width="100%" fo:margin-left="-0.123cm" fo:margin-top="0cm" fo:margin-bottom="0cm" table:align="left" style:writing-mode="page"/>
    </style:style>
    <style:style style:name="Tabla24.A" style:family="table-column">
      <style:table-column-properties style:rel-column-width="12117*"/>
    </style:style>
    <style:style style:name="Tabla24.B" style:family="table-column">
      <style:table-column-properties style:rel-column-width="20997*"/>
    </style:style>
    <style:style style:name="Tabla24.C" style:family="table-column">
      <style:table-column-properties style:rel-column-width="14674*"/>
    </style:style>
    <style:style style:name="Tabla24.D" style:family="table-column">
      <style:table-column-properties style:rel-column-width="17744*"/>
    </style:style>
    <style:style style:name="Tabla24.1" style:family="table-row">
      <style:table-row-properties style:min-row-height="1.132cm" fo:keep-together="auto"/>
    </style:style>
    <style:style style:name="Tabla24.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4.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4.2" style:family="table-row">
      <style:table-row-properties style:min-row-height="0.566cm" fo:keep-together="auto"/>
    </style:style>
    <style:style style:name="Tabla24.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4.B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4.C2"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24.C3"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5" style:family="table">
      <style:table-properties style:rel-width="100%" fo:margin-top="0cm" fo:margin-bottom="0cm" table:align="center" style:writing-mode="page"/>
    </style:style>
    <style:style style:name="Tabla25.A" style:family="table-column">
      <style:table-column-properties style:rel-column-width="47827*"/>
    </style:style>
    <style:style style:name="Tabla25.B" style:family="table-column">
      <style:table-column-properties style:rel-column-width="17707*"/>
    </style:style>
    <style:style style:name="Tabla25.1" style:family="table-row">
      <style:table-row-properties style:min-row-height="0.619cm" fo:keep-together="auto"/>
    </style:style>
    <style:style style:name="Tabla25.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6" style:family="table">
      <style:table-properties style:rel-width="100%" fo:margin-top="0cm" fo:margin-bottom="0cm" table:align="center" style:writing-mode="page"/>
    </style:style>
    <style:style style:name="Tabla26.A" style:family="table-column">
      <style:table-column-properties style:rel-column-width="47827*"/>
    </style:style>
    <style:style style:name="Tabla26.B" style:family="table-column">
      <style:table-column-properties style:rel-column-width="17707*"/>
    </style:style>
    <style:style style:name="Tabla26.1" style:family="table-row">
      <style:table-row-properties style:min-row-height="0.619cm" fo:keep-together="auto"/>
    </style:style>
    <style:style style:name="Tabla2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7" style:family="table">
      <style:table-properties style:width="4.396cm" fo:margin-top="0cm" fo:margin-bottom="0cm" table:align="center" style:writing-mode="page"/>
    </style:style>
    <style:style style:name="Tabla27.A" style:family="table-column">
      <style:table-column-properties style:column-width="1.452cm"/>
    </style:style>
    <style:style style:name="Tabla27.B" style:family="table-column">
      <style:table-column-properties style:column-width="2.942cm"/>
    </style:style>
    <style:style style:name="Tabla27.1" style:family="table-row">
      <style:table-row-properties style:min-row-height="0.365cm" fo:keep-together="auto"/>
    </style:style>
    <style:style style:name="Tabla27.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7.B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27.B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8" style:family="table">
      <style:table-properties style:rel-width="100%" fo:margin-left="-0.191cm" fo:margin-top="0cm" fo:margin-bottom="0cm" table:align="left" style:writing-mode="page"/>
    </style:style>
    <style:style style:name="Tabla28.A" style:family="table-column">
      <style:table-column-properties style:rel-column-width="65535*"/>
    </style:style>
    <style:style style:name="Tabla28.1" style:family="table-row">
      <style:table-row-properties style:min-row-height="2.565cm" fo:keep-together="auto"/>
    </style:style>
    <style:style style:name="Tabla28.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 style:family="paragraph" style:parent-style-name="Standard">
      <style:paragraph-properties fo:margin-left="0.226cm" fo:margin-right="0.035cm" fo:margin-top="0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3" style:family="paragraph" style:parent-style-name="Standard">
      <style:paragraph-properties fo:margin-right="0.787cm" fo:margin-top="0.062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4" style:family="paragraph" style:parent-style-name="Standard">
      <style:paragraph-properties fo:margin-left="0.649cm" fo:margin-right="0.452cm" fo:margin-top="0.042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5" style:family="paragraph" style:parent-style-name="Standard">
      <style:paragraph-properties fo:margin-left="0.878cm" fo:margin-right="0.672cm" fo:margin-top="0.062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6" style:family="paragraph" style:parent-style-name="Standard">
      <style:paragraph-properties fo:margin-left="0.746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7" style:family="paragraph" style:parent-style-name="Standard">
      <style:paragraph-properties fo:margin-left="0.534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8" style:family="paragraph" style:parent-style-name="Standard">
      <style:paragraph-properties fo:margin-left="0.527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9" style:family="paragraph" style:parent-style-name="Standard">
      <style:paragraph-properties fo:margin-left="0.496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0" style:family="paragraph" style:parent-style-name="Standard">
      <style:paragraph-properties fo:margin-left="0.443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1" style:family="paragraph" style:parent-style-name="Standard">
      <style:paragraph-properties fo:margin-left="0.739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2" style:family="paragraph" style:parent-style-name="Standard">
      <style:paragraph-properties fo:margin-left="0.52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3" style:family="paragraph" style:parent-style-name="Standard">
      <style:paragraph-properties fo:margin-left="0.176cm" fo:margin-right="-0.021cm" fo:margin-top="0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 style:family="paragraph" style:parent-style-name="Standard">
      <style:paragraph-properties fo:margin-left="0.295cm" fo:margin-right="0.106cm" fo:margin-top="0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 style:family="paragraph" style:parent-style-name="Standard">
      <style:paragraph-properties fo:margin-left="0.303cm" fo:margin-right="0.106cm" fo:margin-top="0.069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6" style:family="paragraph" style:parent-style-name="Standard">
      <style:paragraph-properties fo:margin-left="0.437cm" fo:margin-right="0.24cm" fo:margin-top="0.002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7" style:family="paragraph" style:parent-style-name="Standard">
      <style:paragraph-properties fo:margin-left="0.219cm" fo:margin-right="0.021cm" fo:margin-top="0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8" style:family="paragraph" style:parent-style-name="Standard">
      <style:paragraph-properties fo:margin-left="0.859cm" fo:margin-right="-0.076cm" fo:margin-top="0cm" fo:margin-bottom="0cm" style:contextual-spacing="false" fo:line-height="115%" fo:text-align="center" style:justify-single-word="false" fo:orphans="2" fo:widows="2" fo:text-indent="-0.67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9" style:family="paragraph" style:parent-style-name="Standard">
      <style:paragraph-properties fo:margin-left="0.499cm" fo:margin-right="-0.064cm" fo:margin-top="0cm" fo:margin-bottom="0cm" style:contextual-spacing="false" fo:line-height="115%" fo:text-align="center" style:justify-single-word="false" fo:orphans="2" fo:widows="2" fo:text-indent="-0.303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0" style:family="paragraph" style:parent-style-name="Standard">
      <style:paragraph-properties fo:margin-left="0.245cm" fo:margin-right="-0.055cm" fo:margin-top="0cm" fo:margin-bottom="0cm" style:contextual-spacing="false" fo:line-height="115%" fo:text-align="start" style:justify-single-word="false" fo:orphans="2" fo:widows="2" fo:text-indent="-0.035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1" style:family="paragraph" style:parent-style-name="Standard">
      <style:paragraph-properties fo:margin-left="0.282cm" fo:margin-right="0.09cm" fo:margin-top="0.069cm" fo:margin-bottom="0cm" style:contextual-spacing="false" fo:line-height="115%"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2" style:family="paragraph" style:parent-style-name="Standard">
      <style:paragraph-properties fo:margin-right="0.326cm" fo:margin-top="0cm" fo:margin-bottom="0cm" style:contextual-spacing="false" fo:line-height="113%"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3" style:family="paragraph" style:parent-style-name="Standard">
      <style:paragraph-properties fo:margin-left="1.028cm" fo:margin-right="0.353cm" fo:margin-top="0cm" fo:margin-bottom="0cm" style:contextual-spacing="false" fo:line-height="113%" fo:text-align="start" style:justify-single-word="false" fo:orphans="2" fo:widows="2" fo:text-indent="-0.416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4" style:family="paragraph" style:parent-style-name="Standard">
      <style:paragraph-properties fo:margin-left="0.718cm" fo:margin-right="0.298cm" fo:margin-top="0.042cm" fo:margin-bottom="0cm" style:contextual-spacing="false" fo:line-height="113%" fo:text-align="start" style:justify-single-word="false" fo:orphans="2" fo:widows="2" fo:text-indent="-0.155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5" style:family="paragraph" style:parent-style-name="Standard">
      <style:paragraph-properties fo:margin-left="0.31cm" fo:margin-right="0.12cm" fo:margin-top="0.002cm" fo:margin-bottom="0cm" style:contextual-spacing="false" fo:line-height="114%"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6" style:family="paragraph" style:parent-style-name="Standard">
      <style:paragraph-properties fo:margin-left="0.55cm" fo:margin-right="0.36cm" fo:margin-top="0.002cm" fo:margin-bottom="0cm" style:contextual-spacing="false" fo:line-height="114%"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7" style:family="paragraph" style:parent-style-name="Standard">
      <style:paragraph-properties fo:margin-right="0.559cm" fo:margin-top="0cm" fo:margin-bottom="0cm" style:contextual-spacing="false" fo:line-height="0.423cm"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8" style:family="paragraph" style:parent-style-name="Standard">
      <style:paragraph-properties fo:margin-top="0.016cm" fo:margin-bottom="0cm" style:contextual-spacing="false" fo:line-height="0.494cm"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29" style:family="paragraph" style:parent-style-name="Standard">
      <style:paragraph-properties fo:margin-left="0.226cm" fo:margin-right="0.035cm" fo:margin-top="0cm" fo:margin-bottom="0cm" style:contextual-spacing="false" fo:line-height="100%" fo:text-align="center" style:justify-single-word="false" fo:orphans="2" fo:widows="2"/>
      <style:text-properties style:font-name="Calibri" fo:font-size="11pt" fo:letter-spacing="0.002cm" fo:language="es" fo:country="PE" style:letter-kerning="false" style:font-name-asian="Arial1" style:font-size-asian="11pt" style:language-asian="es" style:country-asian="PE" style:font-name-complex="Arial1" style:font-size-complex="11pt" style:language-complex="ar" style:country-complex="SA"/>
    </style:style>
    <style:style style:name="P30" style:family="paragraph" style:parent-style-name="Standard">
      <style:paragraph-properties fo:margin-left="0.859cm" fo:margin-right="-0.076cm" fo:margin-top="0cm" fo:margin-bottom="0cm" style:contextual-spacing="false" fo:line-height="115%" fo:text-align="center" style:justify-single-word="false" fo:orphans="2" fo:widows="2" fo:text-indent="-0.67cm" style:auto-text-indent="false"/>
      <style:text-properties style:font-name="Calibri" fo:font-size="11pt" fo:letter-spacing="0.002cm" fo:language="es" fo:country="PE" style:letter-kerning="false" style:font-name-asian="Arial1" style:font-size-asian="11pt" style:language-asian="es" style:country-asian="PE" style:font-name-complex="Arial1" style:font-size-complex="11pt" style:language-complex="ar" style:country-complex="SA"/>
    </style:style>
    <style:style style:name="P31" style:family="paragraph" style:parent-style-name="Standard">
      <style:paragraph-properties fo:margin-left="0.499cm" fo:margin-right="-0.064cm" fo:margin-top="0cm" fo:margin-bottom="0cm" style:contextual-spacing="false" fo:line-height="115%" fo:text-align="center" style:justify-single-word="false" fo:orphans="2" fo:widows="2" fo:text-indent="-0.303cm" style:auto-text-indent="false"/>
      <style:text-properties style:font-name="Calibri" fo:font-size="11pt" fo:letter-spacing="0.002cm" fo:language="es" fo:country="MX" style:letter-kerning="false" style:font-name-asian="Arial1" style:font-size-asian="11pt" style:language-asian="es" style:country-asian="PE" style:font-name-complex="Arial1" style:font-size-complex="11pt" style:language-complex="ar" style:country-complex="SA"/>
    </style:style>
    <style:style style:name="P32" style:family="paragraph" style:parent-style-name="Standard">
      <style:paragraph-properties fo:margin-top="0.007cm" fo:margin-bottom="0cm" style:contextual-spacing="false" fo:line-height="0.247cm" fo:text-align="start" style:justify-single-word="false" fo:orphans="2" fo:widows="2"/>
      <style:text-properties style:font-name="Calibri" fo:font-size="7pt" fo:language="es" fo:country="PE" style:letter-kerning="false" style:font-name-asian="F" style:font-size-asian="7pt" style:language-asian="es" style:country-asian="PE" style:font-name-complex="F" style:font-size-complex="7pt" style:language-complex="ar" style:country-complex="SA"/>
    </style:style>
    <style:style style:name="P33" style:family="paragraph" style:parent-style-name="Standard">
      <style:paragraph-properties fo:margin-top="0.016cm" fo:margin-bottom="0cm" style:contextual-spacing="false" fo:line-height="0.247cm" fo:text-align="start" style:justify-single-word="false" fo:orphans="2" fo:widows="2"/>
      <style:text-properties style:font-name="Calibri" fo:font-size="7pt" fo:language="es" fo:country="PE" style:letter-kerning="false" style:font-name-asian="F" style:font-size-asian="7pt" style:language-asian="es" style:country-asian="PE" style:font-name-complex="F" style:font-size-complex="7pt" style:language-complex="ar" style:country-complex="SA"/>
    </style:style>
    <style:style style:name="P34" style:family="paragraph" style:parent-style-name="Standard">
      <style:paragraph-properties fo:margin-top="0.007cm" fo:margin-bottom="0cm" style:contextual-spacing="false" fo:line-height="0.247cm" fo:text-align="center" style:justify-single-word="false" fo:orphans="2" fo:widows="2"/>
      <style:text-properties style:font-name="Calibri" fo:font-size="7pt" fo:language="es" fo:country="PE" style:letter-kerning="false" style:font-name-asian="F" style:font-size-asian="7pt" style:language-asian="es" style:country-asian="PE" style:font-name-complex="F" style:font-size-complex="7pt" style:language-complex="ar" style:country-complex="SA"/>
    </style:style>
    <style:style style:name="P35" style:family="paragraph" style:parent-style-name="Standard">
      <style:paragraph-properties fo:margin-top="0.007cm" fo:margin-bottom="0cm" style:contextual-spacing="false" fo:line-height="0.247cm" fo:text-align="center" style:justify-single-word="false" fo:orphans="2" fo:widows="2"/>
      <style:text-properties style:font-name="Calibri" fo:font-size="7pt" fo:language="es" fo:country="MX" style:letter-kerning="false" style:font-name-asian="F" style:font-size-asian="7pt" style:language-asian="es" style:country-asian="PE" style:font-name-complex="F" style:font-size-complex="7pt" style:language-complex="ar" style:country-complex="SA"/>
    </style:style>
    <style:style style:name="P36" style:family="paragraph" style:parent-style-name="Standard">
      <style:paragraph-properties fo:margin-top="0.016cm" fo:margin-bottom="0cm" style:contextual-spacing="false" fo:line-height="0.494cm" fo:text-align="start" style:justify-single-word="false" fo:orphans="2" fo:widows="2"/>
      <style:text-properties style:font-name="Calibri" fo:font-size="14pt" fo:language="es" fo:country="MX" style:letter-kerning="false" style:font-name-asian="F" style:font-size-asian="14pt" style:language-asian="es" style:country-asian="PE" style:font-name-complex="F" style:font-size-complex="14pt" style:language-complex="ar" style:country-complex="SA"/>
    </style:style>
    <style:style style:name="P37" style:family="paragraph" style:parent-style-name="Standard">
      <style:paragraph-properties fo:margin-top="0.023cm" fo:margin-bottom="0cm" style:contextual-spacing="false" fo:line-height="0.494cm" fo:text-align="start" style:justify-single-word="false" fo:orphans="2" fo:widows="2"/>
      <style:text-properties style:font-name="Calibri" fo:font-size="14pt" fo:language="es" fo:country="MX" style:letter-kerning="false" style:font-name-asian="F" style:font-size-asian="14pt" style:language-asian="es" style:country-asian="PE" style:font-name-complex="F" style:font-size-complex="14pt" style:language-complex="ar" style:country-complex="SA"/>
    </style:style>
    <style:style style:name="P38" style:family="paragraph" style:parent-style-name="Standard">
      <style:paragraph-properties fo:margin-top="0.016cm" fo:margin-bottom="0cm" style:contextual-spacing="false" fo:line-height="0.494cm" fo:text-align="center" style:justify-single-word="false" fo:orphans="2" fo:widows="2"/>
      <style:text-properties style:font-name="Calibri" fo:font-size="14pt" fo:language="es" fo:country="MX" style:letter-kerning="false" style:font-name-asian="F" style:font-size-asian="14pt" style:language-asian="es" style:country-asian="PE" style:font-name-complex="F" style:font-size-complex="14pt" style:language-complex="ar" style:country-complex="SA"/>
    </style:style>
    <style:style style:name="P39" style:family="paragraph" style:parent-style-name="Standard">
      <style:paragraph-properties fo:margin-top="0.023cm" fo:margin-bottom="0cm" style:contextual-spacing="false" fo:line-height="0.494cm" fo:text-align="start" style:justify-single-word="false" fo:orphans="2" fo:widows="2"/>
      <style:text-properties style:font-name="Calibri" fo:font-size="14pt" fo:language="es" fo:country="PE" style:letter-kerning="false" style:font-name-asian="F" style:font-size-asian="14pt" style:language-asian="es" style:country-asian="PE" style:font-name-complex="F" style:font-size-complex="14pt" style:language-complex="ar" style:country-complex="SA"/>
    </style:style>
    <style:style style:name="P40" style:family="paragraph" style:parent-style-name="Standard">
      <style:paragraph-properties fo:margin-top="0.009cm" fo:margin-bottom="0cm" style:contextual-spacing="false" fo:line-height="0.247cm" fo:text-align="start" style:justify-single-word="false" fo:orphans="2" fo:widows="2"/>
      <style:text-properties style:font-name="Times New Roman" fo:font-size="7pt" fo:language="es" fo:country="MX" style:letter-kerning="false" style:font-name-asian="F" style:font-size-asian="7pt" style:language-asian="en" style:country-asian="US" style:font-name-complex="F" style:font-size-complex="7pt" style:language-complex="ar" style:country-complex="SA"/>
    </style:style>
    <style:style style:name="P41" style:family="paragraph" style:parent-style-name="Standard">
      <style:paragraph-properties fo:margin-top="0cm" fo:margin-bottom="0cm" style:contextual-spacing="false" fo:line-height="0.353cm" fo:text-align="start" style:justify-single-word="false" fo:orphans="2" fo:widows="2"/>
      <style:text-properties style:font-name="Times New Roman" fo:font-size="10pt" fo:language="es" fo:country="MX" style:letter-kerning="false" style:font-name-asian="F" style:font-size-asian="10pt" style:language-asian="en" style:country-asian="US" style:font-name-complex="F" style:font-size-complex="10pt" style:language-complex="ar" style:country-complex="SA"/>
    </style:style>
    <style:style style:name="P42" style:family="paragraph" style:parent-style-name="Standard">
      <style:paragraph-properties fo:margin-top="0cm" fo:margin-bottom="0cm" style:contextual-spacing="false" fo:line-height="0.353cm" fo:text-align="start" style:justify-single-word="false" fo:orphans="2" fo:widows="2"/>
      <style:text-properties style:font-name="Times New Roman" fo:font-size="10pt" fo:language="es" fo:country="PE" style:letter-kerning="false" style:font-name-asian="F" style:font-size-asian="10pt" style:language-asian="en" style:country-asian="US" style:font-name-complex="F" style:font-size-complex="10pt" style:language-complex="ar" style:country-complex="SA"/>
    </style:style>
    <style:style style:name="P43" style:family="paragraph" style:parent-style-name="Standard">
      <style:paragraph-properties fo:margin-top="0.03cm" fo:margin-bottom="0cm" style:contextual-spacing="false" fo:line-height="0.388cm" fo:text-align="start" style:justify-single-word="false" fo:orphans="2" fo:widows="2"/>
      <style:text-properties style:font-name="Times New Roman" fo:font-size="11pt" fo:language="es" fo:country="MX" style:letter-kerning="false" style:font-name-asian="F" style:font-size-asian="11pt" style:language-asian="en" style:country-asian="US" style:font-name-complex="F" style:font-size-complex="11pt" style:language-complex="ar" style:country-complex="SA"/>
    </style:style>
    <style:style style:name="P44" style:family="paragraph" style:parent-style-name="Standard">
      <style:paragraph-properties fo:margin-top="0.03cm" fo:margin-bottom="0cm" style:contextual-spacing="false" fo:line-height="0.388cm" fo:text-align="start" style:justify-single-word="false" fo:orphans="2" fo:widows="2"/>
      <style:text-properties style:font-name="Times New Roman" fo:font-size="11pt" fo:language="es" fo:country="PE" style:letter-kerning="false" style:font-name-asian="F" style:font-size-asian="11pt" style:language-asian="en" style:country-asian="US" style:font-name-complex="F" style:font-size-complex="11pt" style:language-complex="ar" style:country-complex="SA"/>
    </style:style>
    <style:style style:name="P45" style:family="paragraph" style:parent-style-name="Standard">
      <style:paragraph-properties fo:margin-top="0.016cm" fo:margin-bottom="0cm" style:contextual-spacing="false" fo:line-height="0.282cm" fo:text-align="start" style:justify-single-word="false" fo:orphans="2" fo:widows="2"/>
      <style:text-properties style:font-name="Times New Roman" fo:font-size="8pt" fo:language="en" fo:country="US" style:letter-kerning="false" style:font-name-asian="F" style:font-size-asian="8pt" style:language-asian="en" style:country-asian="US" style:font-name-complex="F" style:font-size-complex="8pt" style:language-complex="ar" style:country-complex="SA"/>
    </style:style>
    <style:style style:name="P46" style:family="paragraph" style:parent-style-name="Standard">
      <style:paragraph-properties fo:margin-top="0.016cm" fo:margin-bottom="0cm" style:contextual-spacing="false" fo:line-height="0.282cm" fo:text-align="start" style:justify-single-word="false" fo:orphans="2" fo:widows="2"/>
      <style:text-properties style:font-name="Times New Roman" fo:font-size="8pt" fo:language="es" fo:country="MX" style:letter-kerning="false" style:font-name-asian="F" style:font-size-asian="8pt" style:language-asian="en" style:country-asian="US" style:font-name-complex="F" style:font-size-complex="8pt" style:language-complex="ar" style:country-complex="SA"/>
    </style:style>
    <style:style style:name="P47" style:family="paragraph" style:parent-style-name="Standard">
      <style:paragraph-properties fo:margin-top="0.016cm" fo:margin-bottom="0cm" style:contextual-spacing="false" fo:line-height="0.494cm" fo:text-align="start" style:justify-single-word="false" fo:orphans="2" fo:widows="2"/>
      <style:text-properties style:font-name="Times New Roman" fo:font-size="14pt" fo:language="en" fo:country="US" style:letter-kerning="false" style:font-name-asian="F" style:font-size-asian="14pt" style:language-asian="en" style:country-asian="US" style:font-name-complex="F" style:font-size-complex="14pt" style:language-complex="ar" style:country-complex="SA"/>
    </style:style>
    <style:style style:name="P48" style:family="paragraph" style:parent-style-name="Default">
      <style:paragraph-properties fo:text-align="justify" style:justify-single-word="false"/>
    </style:style>
    <style:style style:name="P49" style:family="paragraph" style:parent-style-name="Footer">
      <style:paragraph-properties fo:text-align="end" style:justify-single-word="false"/>
    </style:style>
    <style:style style:name="P50" style:family="paragraph" style:parent-style-name="Footer">
      <style:paragraph-properties fo:text-align="end" style:justify-single-word="false"/>
    </style:style>
    <style:style style:name="P51" style:family="paragraph" style:parent-style-name="Frame_20_contents">
      <style:paragraph-properties fo:margin-top="0cm" fo:margin-bottom="0cm" style:contextual-spacing="false" fo:text-align="center" style:justify-single-word="false"/>
    </style:style>
    <style:style style:name="P52" style:family="paragraph" style:parent-style-name="Frame_20_contents">
      <style:paragraph-properties fo:text-align="center" style:justify-single-word="false"/>
    </style:style>
    <style:style style:name="P53" style:family="paragraph" style:parent-style-name="Header">
      <style:paragraph-properties fo:text-align="center" style:justify-single-word="false"/>
    </style:style>
    <style:style style:name="P54" style:family="paragraph" style:parent-style-name="Header">
      <style:paragraph-properties fo:text-align="center" style:justify-single-word="false"/>
      <style:text-properties style:font-name="Arial" fo:font-size="8pt" fo:font-style="italic" style:font-size-asian="8pt" style:font-style-asian="italic" style:font-name-complex="Arial1" style:font-size-complex="9pt"/>
    </style:style>
    <style:style style:name="P55" style:family="paragraph" style:parent-style-name="Heading_20_2" style:list-style-name="">
      <style:paragraph-properties fo:margin-left="0cm" fo:line-height="100%" fo:text-align="justify" style:justify-single-word="false" fo:text-indent="0cm" style:auto-text-indent="false"/>
      <style:text-properties style:use-window-font-color="true" loext:opacity="0%" style:font-name="Calibri" fo:font-size="11pt" style:font-size-asian="11pt" style:font-name-complex="Times New Roman1" style:font-size-complex="11pt">
        <loext:char-complex-color loext:theme-type="accent1" loext:color-type="theme"/>
      </style:text-properties>
    </style:style>
    <style:style style:name="P56" style:family="paragraph" style:parent-style-name="Heading_20_2" style:list-style-name="">
      <style:paragraph-properties fo:margin-left="0.751cm" fo:line-height="100%" fo:text-align="center" style:justify-single-word="false" fo:text-indent="0cm" style:auto-text-indent="false"/>
    </style:style>
    <style:style style:name="P57" style:family="paragraph" style:parent-style-name="Heading_20_3" style:list-style-name="">
      <style:paragraph-properties fo:margin-left="0cm" fo:text-indent="0cm" style:auto-text-indent="false"/>
    </style:style>
    <style:style style:name="P58" style:family="paragraph" style:parent-style-name="List_20_Paragraph" style:list-style-name="WWNum5">
      <style:paragraph-properties fo:margin-top="0cm" fo:margin-bottom="0cm" style:contextual-spacing="true" fo:line-height="100%"/>
    </style:style>
    <style:style style:name="P59" style:family="paragraph" style:parent-style-name="List_20_Paragraph" style:list-style-name="WWNum5">
      <style:paragraph-properties fo:margin-left="0.751cm" fo:margin-top="0cm" fo:margin-bottom="0cm" style:contextual-spacing="true" fo:line-height="100%" fo:text-indent="-0.751cm" style:auto-text-indent="false"/>
    </style:style>
    <style:style style:name="P60" style:family="paragraph" style:parent-style-name="List_20_Paragraph" style:list-style-name="WWNum5">
      <style:paragraph-properties fo:margin-left="0.751cm" fo:margin-top="0cm" fo:margin-bottom="0cm" style:contextual-spacing="true" fo:line-height="100%" fo:text-align="justify" style:justify-single-word="false" fo:text-indent="-0.751cm" style:auto-text-indent="false"/>
    </style:style>
    <style:style style:name="P61" style:family="paragraph" style:parent-style-name="List_20_Paragraph" style:list-style-name="WWNum5" style:master-page-name="Converted1">
      <style:paragraph-properties fo:margin-left="0.751cm" fo:margin-top="0cm" fo:margin-bottom="0cm" style:contextual-spacing="true" fo:line-height="100%" fo:text-align="justify" style:justify-single-word="false" fo:text-indent="-0.751cm" style:auto-text-indent="false" style:page-number="auto"/>
    </style:style>
    <style:style style:name="P62" style:family="paragraph" style:parent-style-name="List_20_Paragraph" style:list-style-name="WWNum7">
      <style:paragraph-properties fo:margin-top="0cm" fo:margin-bottom="0cm" style:contextual-spacing="false" fo:line-height="100%" fo:text-align="justify" style:justify-single-word="false"/>
    </style:style>
    <style:style style:name="P63" style:family="paragraph" style:parent-style-name="List_20_Paragraph" style:list-style-name="WWNum8">
      <style:paragraph-properties fo:margin-top="0cm" fo:margin-bottom="0cm" style:contextual-spacing="false" fo:line-height="100%" fo:text-align="justify" style:justify-single-word="false"/>
    </style:style>
    <style:style style:name="P64" style:family="paragraph" style:parent-style-name="List_20_Paragraph" style:list-style-name="WWNum13">
      <style:paragraph-properties fo:margin-left="0.635cm" fo:margin-top="0cm" fo:margin-bottom="0cm" style:contextual-spacing="true" fo:line-height="100%" fo:text-align="justify" style:justify-single-word="false" fo:text-indent="-0.635cm" style:auto-text-indent="false"/>
    </style:style>
    <style:style style:name="P65" style:family="paragraph" style:parent-style-name="List_20_Paragraph" style:list-style-name="WWNum14">
      <style:paragraph-properties fo:margin-top="0cm" fo:margin-bottom="0cm" style:contextual-spacing="true" fo:line-height="100%" fo:text-align="justify" style:justify-single-word="false"/>
    </style:style>
    <style:style style:name="P66" style:family="paragraph" style:parent-style-name="List_20_Paragraph" style:list-style-name="WWNum14">
      <style:paragraph-properties fo:margin-left="1.349cm" fo:margin-top="0cm" fo:margin-bottom="0cm" style:contextual-spacing="true" fo:line-height="100%" fo:text-align="justify" style:justify-single-word="false" fo:text-indent="-0.714cm" style:auto-text-indent="false"/>
    </style:style>
    <style:style style:name="P67" style:family="paragraph" style:parent-style-name="List_20_Paragraph" style:list-style-name="WWNum25">
      <style:paragraph-properties fo:margin-left="0.635cm" fo:margin-top="0cm" fo:margin-bottom="0cm" style:contextual-spacing="false" fo:line-height="100%" fo:text-align="justify" style:justify-single-word="false" fo:text-indent="-0.635cm" style:auto-text-indent="false"/>
    </style:style>
    <style:style style:name="P68" style:family="paragraph" style:parent-style-name="List_20_Paragraph" style:list-style-name="WWNum3">
      <style:paragraph-properties fo:margin-left="1.752cm" fo:margin-top="0cm" fo:margin-bottom="0cm" style:contextual-spacing="true" fo:line-height="100%" fo:text-indent="-0.568cm" style:auto-text-indent="false"/>
    </style:style>
    <style:style style:name="P69" style:family="paragraph" style:parent-style-name="List_20_Paragraph">
      <style:paragraph-properties fo:margin-left="0cm" fo:margin-top="0cm" fo:margin-bottom="0cm" style:contextual-spacing="true" fo:line-height="100%"/>
    </style:style>
    <style:style style:name="P70" style:family="paragraph" style:parent-style-name="List_20_Paragraph" style:list-style-name="WWNum12">
      <style:paragraph-properties fo:margin-top="0cm" fo:margin-bottom="0cm" style:contextual-spacing="true" fo:line-height="100%"/>
    </style:style>
    <style:style style:name="P71" style:family="paragraph" style:parent-style-name="List_20_Paragraph">
      <style:paragraph-properties fo:margin-left="0.635cm" fo:margin-top="0cm" fo:margin-bottom="0cm" style:contextual-spacing="true" fo:line-height="100%"/>
      <style:text-properties style:font-name-complex="Times New Roman1"/>
    </style:style>
    <style:style style:name="P72" style:family="paragraph" style:parent-style-name="List_20_Paragraph">
      <style:paragraph-properties fo:margin-left="1.501cm" fo:margin-top="0cm" fo:margin-bottom="0cm" style:contextual-spacing="true" fo:line-height="100%"/>
      <style:text-properties style:font-name-complex="Times New Roman1"/>
    </style:style>
    <style:style style:name="P73" style:family="paragraph" style:parent-style-name="List_20_Paragraph">
      <style:paragraph-properties fo:margin-left="1.905cm" fo:margin-top="0cm" fo:margin-bottom="0cm" style:contextual-spacing="true" fo:line-height="100%">
        <style:tab-stops>
          <style:tab-stop style:position="0.501cm"/>
        </style:tab-stops>
      </style:paragraph-properties>
      <style:text-properties style:font-name-complex="Times New Roman1"/>
    </style:style>
    <style:style style:name="P74" style:family="paragraph" style:parent-style-name="List_20_Paragraph">
      <style:paragraph-properties fo:margin-left="0.751cm" fo:margin-top="0cm" fo:margin-bottom="0cm" style:contextual-spacing="true" fo:line-height="100%" fo:text-align="justify" style:justify-single-word="false"/>
      <style:text-properties fo:language="es" fo:country="MX" fo:font-weight="bold" style:font-weight-asian="bold" style:font-name-complex="Times New Roman1"/>
    </style:style>
    <style:style style:name="P75" style:family="paragraph" style:parent-style-name="List_20_Paragraph">
      <style:paragraph-properties fo:margin-left="0.635cm" fo:margin-top="0cm" fo:margin-bottom="0cm" style:contextual-spacing="true" fo:line-height="100%"/>
      <style:text-properties fo:color="#000000" loext:opacity="100%" style:font-name-asian="Times New Roman1" style:font-name-complex="Times New Roman1"/>
    </style:style>
    <style:style style:name="P76" style:family="paragraph" style:parent-style-name="List_20_Paragraph">
      <style:paragraph-properties fo:margin-top="0cm" fo:margin-bottom="0cm" style:contextual-spacing="true" fo:line-height="100%"/>
      <style:text-properties fo:color="#000000" loext:opacity="100%" style:font-name-asian="Times New Roman1" style:font-name-complex="Times New Roman1"/>
    </style:style>
    <style:style style:name="P77" style:family="paragraph" style:parent-style-name="List_20_Paragraph">
      <style:paragraph-properties fo:margin-left="0.635cm" fo:margin-top="0cm" fo:margin-bottom="0cm" style:contextual-spacing="false" fo:line-height="100%" fo:text-align="justify" style:justify-single-word="false"/>
      <style:text-properties style:font-name-asian="Arial Unicode MS" style:font-name-complex="Arial1"/>
    </style:style>
    <style:style style:name="P78" style:family="paragraph" style:parent-style-name="List_20_Paragraph">
      <style:paragraph-properties fo:margin-left="0.635cm" fo:margin-top="0cm" fo:margin-bottom="0cm" style:contextual-spacing="false" fo:line-height="100%" fo:text-align="justify" style:justify-single-word="false"/>
      <style:text-properties style:font-name-asian="Arial Unicode MS"/>
    </style:style>
    <style:style style:name="P79" style:family="paragraph" style:parent-style-name="List_20_Paragraph">
      <style:paragraph-properties fo:margin-left="0cm" fo:margin-top="0cm" fo:margin-bottom="0cm" style:contextual-spacing="true" fo:line-height="100%">
        <style:tab-stops>
          <style:tab-stop style:position="0.501cm"/>
        </style:tab-stops>
      </style:paragraph-properties>
      <style:text-properties style:text-underline-style="solid" style:text-underline-width="auto" style:text-underline-color="font-color" fo:font-weight="bold" style:font-weight-asian="bold" style:font-name-complex="Times New Roman1"/>
    </style:style>
    <style:style style:name="P80" style:family="paragraph" style:parent-style-name="List_20_Paragraph">
      <style:paragraph-properties fo:margin-left="0cm" fo:margin-top="0cm" fo:margin-bottom="0cm" style:contextual-spacing="true" fo:line-height="100%">
        <style:tab-stops>
          <style:tab-stop style:position="0.501cm"/>
        </style:tab-stops>
      </style:paragraph-properties>
      <style:text-properties fo:color="#4f81bd" loext:opacity="100%" fo:font-weight="bold" style:font-name-asian="F" style:font-weight-asian="bold" style:font-name-complex="Times New Roman1" style:font-weight-complex="bold">
        <loext:char-complex-color loext:theme-type="accent1" loext:color-type="theme"/>
      </style:text-properties>
    </style:style>
    <style:style style:name="P81" style:family="paragraph" style:parent-style-name="List_20_Paragraph">
      <style:paragraph-properties fo:margin-left="0.751cm" fo:margin-top="0cm" fo:margin-bottom="0cm" style:contextual-spacing="true" fo:line-height="100%"/>
      <style:text-properties fo:font-weight="bold" style:font-weight-asian="bold" style:font-name-complex="Times New Roman1"/>
    </style:style>
    <style:style style:name="P82" style:family="paragraph" style:parent-style-name="List_20_Paragraph">
      <style:paragraph-properties fo:margin-left="0.635cm" fo:margin-top="0cm" fo:margin-bottom="0cm" style:contextual-spacing="true" fo:line-height="100%"/>
      <style:text-properties fo:font-weight="bold" style:font-weight-asian="bold" style:font-name-complex="Times New Roman1"/>
    </style:style>
    <style:style style:name="P83" style:family="paragraph" style:parent-style-name="List_20_Paragraph" style:master-page-name="Converted2">
      <style:paragraph-properties fo:margin-left="0.635cm" fo:margin-top="0cm" fo:margin-bottom="0cm" style:contextual-spacing="true" fo:line-height="100%" style:page-number="auto"/>
      <style:text-properties fo:font-weight="bold" style:font-weight-asian="bold" style:font-name-complex="Times New Roman1"/>
    </style:style>
    <style:style style:name="P84" style:family="paragraph" style:parent-style-name="List_20_Paragraph">
      <style:paragraph-properties fo:margin-left="0.751cm" fo:margin-top="0cm" fo:margin-bottom="0cm" style:contextual-spacing="true" fo:line-height="100%" fo:text-align="justify" style:justify-single-word="false"/>
      <style:text-properties fo:font-weight="bold" style:font-weight-asian="bold" style:font-name-complex="Times New Roman1"/>
    </style:style>
    <style:style style:name="P85" style:family="paragraph" style:parent-style-name="No_20_Spacing">
      <style:paragraph-properties fo:text-align="center" style:justify-single-word="false">
        <style:tab-stops>
          <style:tab-stop style:position="7.5cm" style:type="center"/>
        </style:tab-stops>
      </style:paragraph-properties>
    </style:style>
    <style:style style:name="P86" style:family="paragraph" style:parent-style-name="No_20_Spacing">
      <style:paragraph-properties fo:text-align="center" style:justify-single-word="false"/>
    </style:style>
    <style:style style:name="P87" style:family="paragraph" style:parent-style-name="Standard">
      <style:text-properties fo:language="es" fo:country="MX" style:language-asian="en" style:country-asian="US"/>
    </style:style>
    <style:style style:name="P88" style:family="paragraph" style:parent-style-name="Standard">
      <style:paragraph-properties fo:margin-top="0cm" fo:margin-bottom="0cm" style:contextual-spacing="false" fo:line-height="100%"/>
      <style:text-properties fo:language="es" fo:country="MX" style:language-asian="en" style:country-asian="US" style:font-name-complex="Times New Roman1"/>
    </style:style>
    <style:style style:name="P89" style:family="paragraph" style:parent-style-name="Standard">
      <style:paragraph-properties fo:margin-top="0cm" fo:margin-bottom="0cm" style:contextual-spacing="false" fo:line-height="100%" fo:text-align="justify" style:justify-single-word="false"/>
      <style:text-properties fo:language="es" fo:country="MX" fo:font-weight="bold" style:font-weight-asian="bold" style:font-name-complex="Times New Roman1"/>
    </style:style>
    <style:style style:name="P90" style:family="paragraph" style:parent-style-name="Standard">
      <style:paragraph-properties fo:margin-top="0cm" fo:margin-bottom="0cm" style:contextual-spacing="false" fo:line-height="100%"/>
    </style:style>
    <style:style style:name="P91" style:family="paragraph" style:parent-style-name="Standard">
      <style:paragraph-properties fo:margin-top="0cm" fo:margin-bottom="0cm" style:contextual-spacing="false" fo:line-height="100%" fo:text-align="justify" style:justify-single-word="false"/>
    </style:style>
    <style:style style:name="P92" style:family="paragraph" style:parent-style-name="Standard" style:list-style-name="WWNum7">
      <style:paragraph-properties fo:margin-top="0cm" fo:margin-bottom="0cm" style:contextual-spacing="false" fo:line-height="100%" fo:text-align="justify" style:justify-single-word="false"/>
    </style:style>
    <style:style style:name="P93" style:family="paragraph" style:parent-style-name="Standard">
      <style:paragraph-properties fo:line-height="100%" fo:text-align="justify" style:justify-single-word="false"/>
    </style:style>
    <style:style style:name="P94" style:family="paragraph" style:parent-style-name="Standard">
      <style:paragraph-properties fo:margin-top="0cm" fo:margin-bottom="0cm" style:contextual-spacing="false" fo:line-height="100%" fo:text-align="center" style:justify-single-word="false"/>
    </style:style>
    <style:style style:name="P95" style:family="paragraph" style:parent-style-name="Standard" style:list-style-name="WWNum24">
      <style:paragraph-properties fo:margin-top="0cm" fo:margin-bottom="0cm" style:contextual-spacing="false" fo:line-height="100%"/>
    </style:style>
    <style:style style:name="P96" style:family="paragraph" style:parent-style-name="Standard" style:list-style-name="WWNum23">
      <style:paragraph-properties fo:margin-top="0cm" fo:margin-bottom="0cm" style:contextual-spacing="false" fo:line-height="100%"/>
    </style:style>
    <style:style style:name="P97" style:family="paragraph" style:parent-style-name="Standard" style:list-style-name="WWNum25">
      <style:paragraph-properties fo:margin-top="0cm" fo:margin-bottom="0cm" style:contextual-spacing="false" fo:line-height="100%"/>
    </style:style>
    <style:style style:name="P98" style:family="paragraph" style:parent-style-name="Standard">
      <style:paragraph-properties fo:margin-top="0cm" fo:margin-bottom="0cm" style:contextual-spacing="false" fo:line-height="100%"/>
      <style:text-properties fo:color="#000000" loext:opacity="100%" style:font-name-asian="Times New Roman1" style:font-name-complex="Times New Roman1"/>
    </style:style>
    <style:style style:name="P99" style:family="paragraph" style:parent-style-name="Standard">
      <style:paragraph-properties fo:margin-top="0cm" fo:margin-bottom="0cm" style:contextual-spacing="false" fo:line-height="100%" fo:text-align="center" style:justify-single-word="false"/>
      <style:text-properties fo:color="#000000" loext:opacity="100%" style:font-name-asian="Times New Roman1" style:font-name-complex="Times New Roman1"/>
    </style:style>
    <style:style style:name="P100" style:family="paragraph" style:parent-style-name="Standard">
      <style:paragraph-properties fo:margin-top="0cm" fo:margin-bottom="0cm" style:contextual-spacing="false" fo:line-height="100%" fo:text-align="center" style:justify-single-word="false"/>
      <style:text-properties fo:color="#000000" loext:opacity="100%" fo:font-weight="bold" style:font-name-asian="Times New Roman1" style:font-weight-asian="bold" style:font-name-complex="Times New Roman1"/>
    </style:style>
    <style:style style:name="P101" style:family="paragraph" style:parent-style-name="Standard">
      <style:paragraph-properties fo:margin-left="1.27cm" fo:margin-top="0cm" fo:margin-bottom="0cm" style:contextual-spacing="false" fo:text-align="justify" style:justify-single-word="false"/>
      <style:text-properties fo:color="#000000" loext:opacity="100%" style:rfc-language-tag="es-ES-u-co-trad" fo:language="es" fo:country="ES" style:font-name-asian="Times New Roman1" style:font-name-complex="Times New Roman1"/>
    </style:style>
    <style:style style:name="P102" style:family="paragraph" style:parent-style-name="Standard">
      <style:paragraph-properties fo:margin-left="0.635cm" fo:margin-top="0cm" fo:margin-bottom="0cm" style:contextual-spacing="false" fo:text-align="justify" style:justify-single-word="false"/>
      <style:text-properties fo:color="#000000" loext:opacity="100%" style:rfc-language-tag="es-ES-u-co-trad" fo:language="es" fo:country="ES" style:font-name-asian="Times New Roman1" style:font-name-complex="Times New Roman1"/>
    </style:style>
    <style:style style:name="P103" style:family="paragraph" style:parent-style-name="Standard">
      <style:paragraph-properties fo:margin-left="0.635cm" fo:margin-top="0cm" fo:margin-bottom="0cm" style:contextual-spacing="false" fo:line-height="150%" fo:text-align="justify" style:justify-single-word="false"/>
      <style:text-properties fo:color="#000000" loext:opacity="100%" style:rfc-language-tag="es-ES-u-co-trad" fo:language="es" fo:country="ES" style:font-name-asian="Times New Roman1" style:font-name-complex="Times New Roman1"/>
    </style:style>
    <style:style style:name="P104" style:family="paragraph" style:parent-style-name="Standard">
      <style:paragraph-properties fo:text-align="justify" style:justify-single-word="false"/>
    </style:style>
    <style:style style:name="P105" style:family="paragraph" style:parent-style-name="Standard">
      <style:paragraph-properties fo:margin-top="0cm" fo:margin-bottom="0cm" style:contextual-spacing="false" fo:text-align="justify" style:justify-single-word="false"/>
    </style:style>
    <style:style style:name="P106" style:family="paragraph" style:parent-style-name="Standard" style:list-style-name="WWNum15">
      <style:paragraph-properties fo:margin-top="0cm" fo:margin-bottom="0cm" style:contextual-spacing="false" fo:text-align="justify" style:justify-single-word="false"/>
    </style:style>
    <style:style style:name="P107" style:family="paragraph" style:parent-style-name="Standard">
      <style:paragraph-properties fo:margin-left="1.27cm" fo:margin-top="0cm" fo:margin-bottom="0cm" style:contextual-spacing="false" fo:text-align="justify" style:justify-single-word="false"/>
    </style:style>
    <style:style style:name="P108" style:family="paragraph" style:parent-style-name="Standard">
      <style:paragraph-properties fo:margin-left="0.635cm" fo:margin-top="0cm" fo:margin-bottom="0cm" style:contextual-spacing="false" fo:text-align="justify" style:justify-single-word="false"/>
    </style:style>
    <style:style style:name="P109" style:family="paragraph" style:parent-style-name="Standard" style:list-style-name="WWNum17">
      <style:paragraph-properties fo:margin-top="0cm" fo:margin-bottom="0cm" style:contextual-spacing="false" fo:text-align="justify" style:justify-single-word="false"/>
    </style:style>
    <style:style style:name="P110" style:family="paragraph" style:parent-style-name="Standard" style:list-style-name="WWNum16">
      <style:paragraph-properties fo:margin-top="0cm" fo:margin-bottom="0cm" style:contextual-spacing="false" fo:text-align="justify" style:justify-single-word="false"/>
    </style:style>
    <style:style style:name="P111" style:family="paragraph" style:parent-style-name="Standard" style:list-style-name="WWNum22">
      <style:paragraph-properties fo:margin-left="0.501cm" fo:margin-top="0cm" fo:margin-bottom="0cm" style:contextual-spacing="false" fo:text-align="justify" style:justify-single-word="false" fo:text-indent="-0.501cm" style:auto-text-indent="false"/>
    </style:style>
    <style:style style:name="P112" style:family="paragraph" style:parent-style-name="Standard" style:list-style-name="WWNum22">
      <style:paragraph-properties fo:margin-left="0.501cm" fo:margin-top="0cm" fo:margin-bottom="0cm" style:contextual-spacing="false" fo:text-align="justify" style:justify-single-word="false" fo:text-indent="-0.635cm" style:auto-text-indent="false"/>
    </style:style>
    <style:style style:name="P113" style:family="paragraph" style:parent-style-name="Standard">
      <style:paragraph-properties fo:margin-top="0cm" fo:margin-bottom="0cm" style:contextual-spacing="false" fo:line-height="100%"/>
      <style:text-properties style:font-name-asian="Times New Roman1" style:font-name-complex="Times New Roman1"/>
    </style:style>
    <style:style style:name="P114" style:family="paragraph" style:parent-style-name="Standard">
      <style:paragraph-properties fo:text-align="justify" style:justify-single-word="false"/>
      <style:text-properties style:font-name-asian="Arial Unicode MS" style:font-name-complex="Arial1"/>
    </style:style>
    <style:style style:name="P115" style:family="paragraph" style:parent-style-name="Standard">
      <style:paragraph-properties fo:margin-top="0cm" fo:margin-bottom="0cm" style:contextual-spacing="false" fo:text-align="justify" style:justify-single-word="false"/>
      <style:text-properties style:font-name-asian="Arial Unicode MS"/>
    </style:style>
    <style:style style:name="P116" style:family="paragraph" style:parent-style-name="Standard">
      <style:paragraph-properties fo:margin-top="0cm" fo:margin-bottom="0cm" style:contextual-spacing="false" fo:line-height="100%"/>
      <style:text-properties style:font-name-asian="Arial Unicode MS" style:language-asian="en" style:country-asian="US"/>
    </style:style>
    <style:style style:name="P117" style:family="paragraph" style:parent-style-name="Standard">
      <style:paragraph-properties fo:margin-top="0cm" fo:margin-bottom="0cm" style:contextual-spacing="false" fo:line-height="100%" fo:text-align="justify" style:justify-single-word="false"/>
      <style:text-properties style:language-asian="en" style:country-asian="US" style:font-name-complex="Times New Roman1"/>
    </style:style>
    <style:style style:name="P118" style:family="paragraph" style:parent-style-name="Standard">
      <style:paragraph-properties fo:margin-top="0cm" fo:margin-bottom="0cm" style:contextual-spacing="false" fo:line-height="100%"/>
      <style:text-properties style:language-asian="en" style:country-asian="US" style:font-name-complex="Times New Roman1"/>
    </style:style>
    <style:style style:name="P119" style:family="paragraph" style:parent-style-name="Standard">
      <style:paragraph-properties fo:margin-top="0cm" fo:margin-bottom="0cm" style:contextual-spacing="false"/>
      <style:text-properties style:language-asian="en" style:country-asian="US" style:font-name-complex="Times New Roman1"/>
    </style:style>
    <style:style style:name="P120" style:family="paragraph" style:parent-style-name="Standard">
      <style:text-properties style:language-asian="en" style:country-asian="US"/>
    </style:style>
    <style:style style:name="P121" style:family="paragraph" style:parent-style-name="Standard">
      <style:paragraph-properties fo:text-align="center" style:justify-single-word="false"/>
      <style:text-properties style:language-asian="en" style:country-asian="US"/>
    </style:style>
    <style:style style:name="P122" style:family="paragraph" style:parent-style-name="Standard">
      <style:paragraph-properties fo:margin-top="0cm" fo:margin-bottom="0cm" style:contextual-spacing="false" fo:line-height="100%"/>
      <style:text-properties fo:font-weight="bold" style:font-weight-asian="bold" style:font-name-complex="Times New Roman1"/>
    </style:style>
    <style:style style:name="P123" style:family="paragraph" style:parent-style-name="Standard">
      <style:paragraph-properties fo:margin-top="0cm" fo:margin-bottom="0cm" style:contextual-spacing="false" fo:line-height="100%" fo:text-align="justify" style:justify-single-word="false"/>
      <style:text-properties fo:font-weight="bold" style:font-weight-asian="bold" style:font-name-complex="Times New Roman1"/>
    </style:style>
    <style:style style:name="P124" style:family="paragraph" style:parent-style-name="Standard">
      <style:paragraph-properties fo:margin-top="0cm" fo:margin-bottom="0cm" style:contextual-spacing="false" fo:line-height="100%"/>
      <style:text-properties fo:font-weight="bold" style:language-asian="en" style:country-asian="US" style:font-weight-asian="bold" style:font-name-complex="Times New Roman1"/>
    </style:style>
    <style:style style:name="P125" style:family="paragraph" style:parent-style-name="Standard">
      <style:paragraph-properties fo:text-align="center" style:justify-single-word="false"/>
    </style:style>
    <style:style style:name="P126" style:family="paragraph" style:parent-style-name="Standard">
      <style:paragraph-properties fo:margin-top="0.009cm" fo:margin-bottom="0cm" style:contextual-spacing="false" fo:line-height="0.247cm" fo:text-align="start" style:justify-single-word="false" fo:orphans="2" fo:widows="2"/>
      <style:text-properties style:font-name="Times New Roman" fo:font-size="7pt" fo:language="es" fo:country="MX" style:letter-kerning="false" style:font-name-asian="F" style:font-size-asian="7pt" style:language-asian="en" style:country-asian="US" style:font-name-complex="F" style:font-size-complex="7pt" style:language-complex="ar" style:country-complex="SA"/>
    </style:style>
    <style:style style:name="P127" style:family="paragraph" style:parent-style-name="Standard">
      <style:paragraph-properties fo:margin-top="0cm" fo:margin-bottom="0cm" style:contextual-spacing="false" fo:line-height="0.353cm" fo:text-align="start" style:justify-single-word="false" fo:orphans="2" fo:widows="2"/>
      <style:text-properties style:font-name="Times New Roman" fo:font-size="10pt" fo:language="es" fo:country="MX" style:letter-kerning="false" style:font-name-asian="F" style:font-size-asian="10pt" style:language-asian="en" style:country-asian="US" style:font-name-complex="F" style:font-size-complex="10pt" style:language-complex="ar" style:country-complex="SA"/>
    </style:style>
    <style:style style:name="P128" style:family="paragraph" style:parent-style-name="Standard">
      <style:paragraph-properties fo:margin-top="0cm" fo:margin-bottom="0cm" style:contextual-spacing="false" fo:line-height="0.353cm" fo:text-align="start" style:justify-single-word="false" fo:orphans="2" fo:widows="2"/>
      <style:text-properties style:font-name="Times New Roman" fo:font-size="10pt" fo:language="es" fo:country="PE" style:letter-kerning="false" style:font-name-asian="F" style:font-size-asian="10pt" style:language-asian="en" style:country-asian="US" style:font-name-complex="F" style:font-size-complex="10pt" style:language-complex="ar" style:country-complex="SA"/>
    </style:style>
    <style:style style:name="P129" style:family="paragraph" style:parent-style-name="Standard">
      <style:paragraph-properties fo:margin-top="0.016cm" fo:margin-bottom="0cm" style:contextual-spacing="false" fo:line-height="0.282cm" fo:text-align="start" style:justify-single-word="false" fo:orphans="2" fo:widows="2"/>
      <style:text-properties style:font-name="Times New Roman" fo:font-size="8pt" fo:language="en" fo:country="US" style:letter-kerning="false" style:font-name-asian="F" style:font-size-asian="8pt" style:language-asian="en" style:country-asian="US" style:font-name-complex="F" style:font-size-complex="8pt" style:language-complex="ar" style:country-complex="SA"/>
    </style:style>
    <style:style style:name="P130" style:family="paragraph" style:parent-style-name="Standard">
      <style:paragraph-properties fo:margin-top="0.016cm" fo:margin-bottom="0cm" style:contextual-spacing="false" fo:line-height="0.282cm" fo:text-align="start" style:justify-single-word="false" fo:orphans="2" fo:widows="2"/>
      <style:text-properties style:font-name="Times New Roman" fo:font-size="8pt" fo:language="es" fo:country="MX" style:letter-kerning="false" style:font-name-asian="F" style:font-size-asian="8pt" style:language-asian="en" style:country-asian="US" style:font-name-complex="F" style:font-size-complex="8pt" style:language-complex="ar" style:country-complex="SA"/>
    </style:style>
    <style:style style:name="P131" style:family="paragraph" style:parent-style-name="Standard">
      <style:paragraph-properties fo:margin-top="0.016cm" fo:margin-bottom="0cm" style:contextual-spacing="false" fo:line-height="0.494cm" fo:text-align="start" style:justify-single-word="false" fo:orphans="2" fo:widows="2"/>
      <style:text-properties style:font-name="Times New Roman" fo:font-size="14pt" fo:language="en" fo:country="US" style:letter-kerning="false" style:font-name-asian="F" style:font-size-asian="14pt" style:language-asian="en" style:country-asian="US" style:font-name-complex="F" style:font-size-complex="14pt" style:language-complex="ar" style:country-complex="SA"/>
    </style:style>
    <style:style style:name="P132" style:family="paragraph" style:parent-style-name="Standard">
      <style:paragraph-properties fo:margin-top="0.03cm" fo:margin-bottom="0cm" style:contextual-spacing="false" fo:line-height="0.388cm" fo:text-align="start" style:justify-single-word="false" fo:orphans="2" fo:widows="2"/>
      <style:text-properties style:font-name="Times New Roman" fo:font-size="11pt" fo:language="es" fo:country="MX" style:letter-kerning="false" style:font-name-asian="F" style:font-size-asian="11pt" style:language-asian="en" style:country-asian="US" style:font-name-complex="F" style:font-size-complex="11pt" style:language-complex="ar" style:country-complex="SA"/>
    </style:style>
    <style:style style:name="P133" style:family="paragraph" style:parent-style-name="Standard">
      <style:paragraph-properties fo:margin-top="0.03cm" fo:margin-bottom="0cm" style:contextual-spacing="false" fo:line-height="0.388cm" fo:text-align="start" style:justify-single-word="false" fo:orphans="2" fo:widows="2"/>
      <style:text-properties style:font-name="Times New Roman" fo:font-size="11pt" fo:language="es" fo:country="PE" style:letter-kerning="false" style:font-name-asian="F" style:font-size-asian="11pt" style:language-asian="en" style:country-asian="US" style:font-name-complex="F" style:font-size-complex="11pt" style:language-complex="ar" style:country-complex="SA"/>
    </style:style>
    <style:style style:name="P13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35" style:family="paragraph" style:parent-style-name="Standard">
      <style:paragraph-properties fo:margin-left="0.226cm" fo:margin-right="0.035cm" fo:margin-top="0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36" style:family="paragraph" style:parent-style-name="Standard">
      <style:paragraph-properties fo:margin-right="0.787cm" fo:margin-top="0.062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37" style:family="paragraph" style:parent-style-name="Standard">
      <style:paragraph-properties fo:margin-left="0.649cm" fo:margin-right="0.452cm" fo:margin-top="0.042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38" style:family="paragraph" style:parent-style-name="Standard">
      <style:paragraph-properties fo:margin-left="0.878cm" fo:margin-right="0.672cm" fo:margin-top="0.062cm" fo:margin-bottom="0cm" style:contextual-spacing="false" fo:line-height="100%"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39" style:family="paragraph" style:parent-style-name="Standard">
      <style:paragraph-properties fo:margin-left="0.746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0" style:family="paragraph" style:parent-style-name="Standard">
      <style:paragraph-properties fo:margin-left="0.534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1" style:family="paragraph" style:parent-style-name="Standard">
      <style:paragraph-properties fo:margin-left="0.527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2" style:family="paragraph" style:parent-style-name="Standard">
      <style:paragraph-properties fo:margin-left="0.496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3" style:family="paragraph" style:parent-style-name="Standard">
      <style:paragraph-properties fo:margin-left="0.443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4" style:family="paragraph" style:parent-style-name="Standard">
      <style:paragraph-properties fo:margin-left="0.739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5" style:family="paragraph" style:parent-style-name="Standard">
      <style:paragraph-properties fo:margin-left="0.52cm" fo:margin-top="0cm" fo:margin-bottom="0cm" style:contextual-spacing="false" fo:line-height="100%"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6" style:family="paragraph" style:parent-style-name="Standard">
      <style:paragraph-properties fo:margin-left="0.176cm" fo:margin-right="-0.021cm" fo:margin-top="0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7" style:family="paragraph" style:parent-style-name="Standard">
      <style:paragraph-properties fo:margin-left="0.295cm" fo:margin-right="0.106cm" fo:margin-top="0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8" style:family="paragraph" style:parent-style-name="Standard">
      <style:paragraph-properties fo:margin-left="0.303cm" fo:margin-right="0.106cm" fo:margin-top="0.069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49" style:family="paragraph" style:parent-style-name="Standard">
      <style:paragraph-properties fo:margin-left="0.437cm" fo:margin-right="0.24cm" fo:margin-top="0.002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0" style:family="paragraph" style:parent-style-name="Standard">
      <style:paragraph-properties fo:margin-left="0.219cm" fo:margin-right="0.021cm" fo:margin-top="0cm" fo:margin-bottom="0cm" style:contextual-spacing="false" fo:line-height="115%"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1" style:family="paragraph" style:parent-style-name="Standard">
      <style:paragraph-properties fo:margin-left="0.859cm" fo:margin-right="-0.076cm" fo:margin-top="0cm" fo:margin-bottom="0cm" style:contextual-spacing="false" fo:line-height="115%" fo:text-align="center" style:justify-single-word="false" fo:orphans="2" fo:widows="2" fo:text-indent="-0.67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2" style:family="paragraph" style:parent-style-name="Standard">
      <style:paragraph-properties fo:margin-left="0.499cm" fo:margin-right="-0.064cm" fo:margin-top="0cm" fo:margin-bottom="0cm" style:contextual-spacing="false" fo:line-height="115%" fo:text-align="center" style:justify-single-word="false" fo:orphans="2" fo:widows="2" fo:text-indent="-0.303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3" style:family="paragraph" style:parent-style-name="Standard">
      <style:paragraph-properties fo:margin-left="0.245cm" fo:margin-right="-0.055cm" fo:margin-top="0cm" fo:margin-bottom="0cm" style:contextual-spacing="false" fo:line-height="115%" fo:text-align="start" style:justify-single-word="false" fo:orphans="2" fo:widows="2" fo:text-indent="-0.035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4" style:family="paragraph" style:parent-style-name="Standard">
      <style:paragraph-properties fo:margin-left="0.282cm" fo:margin-right="0.09cm" fo:margin-top="0.069cm" fo:margin-bottom="0cm" style:contextual-spacing="false" fo:line-height="115%"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5" style:family="paragraph" style:parent-style-name="Standard">
      <style:paragraph-properties fo:margin-right="0.326cm" fo:margin-top="0cm" fo:margin-bottom="0cm" style:contextual-spacing="false" fo:line-height="113%"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6" style:family="paragraph" style:parent-style-name="Standard">
      <style:paragraph-properties fo:margin-left="1.028cm" fo:margin-right="0.353cm" fo:margin-top="0cm" fo:margin-bottom="0cm" style:contextual-spacing="false" fo:line-height="113%" fo:text-align="start" style:justify-single-word="false" fo:orphans="2" fo:widows="2" fo:text-indent="-0.416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7" style:family="paragraph" style:parent-style-name="Standard">
      <style:paragraph-properties fo:margin-left="0.718cm" fo:margin-right="0.298cm" fo:margin-top="0.042cm" fo:margin-bottom="0cm" style:contextual-spacing="false" fo:line-height="113%" fo:text-align="start" style:justify-single-word="false" fo:orphans="2" fo:widows="2" fo:text-indent="-0.155cm" style:auto-text-indent="false"/>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8" style:family="paragraph" style:parent-style-name="Standard">
      <style:paragraph-properties fo:margin-left="0.31cm" fo:margin-right="0.12cm" fo:margin-top="0.002cm" fo:margin-bottom="0cm" style:contextual-spacing="false" fo:line-height="114%"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59" style:family="paragraph" style:parent-style-name="Standard">
      <style:paragraph-properties fo:margin-left="0.55cm" fo:margin-right="0.36cm" fo:margin-top="0.002cm" fo:margin-bottom="0cm" style:contextual-spacing="false" fo:line-height="114%"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60" style:family="paragraph" style:parent-style-name="Standard">
      <style:paragraph-properties fo:margin-right="0.559cm" fo:margin-top="0cm" fo:margin-bottom="0cm" style:contextual-spacing="false" fo:line-height="0.423cm" fo:text-align="start"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61" style:family="paragraph" style:parent-style-name="Standard">
      <style:paragraph-properties fo:margin-top="0.016cm" fo:margin-bottom="0cm" style:contextual-spacing="false" fo:line-height="0.494cm" fo:text-align="center" style:justify-single-word="false" fo:orphans="2" fo:widows="2"/>
      <style:text-properties style:font-name="Calibri" fo:font-size="11pt" fo:language="es" fo:country="PE" style:letter-kerning="false" style:font-name-asian="F" style:font-size-asian="11pt" style:language-asian="es" style:country-asian="PE" style:font-name-complex="F" style:font-size-complex="11pt" style:language-complex="ar" style:country-complex="SA"/>
    </style:style>
    <style:style style:name="P162" style:family="paragraph" style:parent-style-name="Standard">
      <style:paragraph-properties fo:margin-left="0.226cm" fo:margin-right="0.035cm" fo:margin-top="0cm" fo:margin-bottom="0cm" style:contextual-spacing="false" fo:line-height="100%" fo:text-align="center" style:justify-single-word="false" fo:orphans="2" fo:widows="2"/>
      <style:text-properties style:font-name="Calibri" fo:font-size="11pt" fo:letter-spacing="0.002cm" fo:language="es" fo:country="PE" style:letter-kerning="false" style:font-name-asian="Arial1" style:font-size-asian="11pt" style:language-asian="es" style:country-asian="PE" style:font-name-complex="Arial1" style:font-size-complex="11pt" style:language-complex="ar" style:country-complex="SA"/>
    </style:style>
    <style:style style:name="P163" style:family="paragraph" style:parent-style-name="Standard">
      <style:paragraph-properties fo:margin-left="0.859cm" fo:margin-right="-0.076cm" fo:margin-top="0cm" fo:margin-bottom="0cm" style:contextual-spacing="false" fo:line-height="115%" fo:text-align="center" style:justify-single-word="false" fo:orphans="2" fo:widows="2" fo:text-indent="-0.67cm" style:auto-text-indent="false"/>
      <style:text-properties style:font-name="Calibri" fo:font-size="11pt" fo:letter-spacing="0.002cm" fo:language="es" fo:country="PE" style:letter-kerning="false" style:font-name-asian="Arial1" style:font-size-asian="11pt" style:language-asian="es" style:country-asian="PE" style:font-name-complex="Arial1" style:font-size-complex="11pt" style:language-complex="ar" style:country-complex="SA"/>
    </style:style>
    <style:style style:name="P164" style:family="paragraph" style:parent-style-name="Standard">
      <style:paragraph-properties fo:margin-left="0.499cm" fo:margin-right="-0.064cm" fo:margin-top="0cm" fo:margin-bottom="0cm" style:contextual-spacing="false" fo:line-height="115%" fo:text-align="center" style:justify-single-word="false" fo:orphans="2" fo:widows="2" fo:text-indent="-0.303cm" style:auto-text-indent="false"/>
      <style:text-properties style:font-name="Calibri" fo:font-size="11pt" fo:letter-spacing="0.002cm" fo:language="es" fo:country="MX" style:letter-kerning="false" style:font-name-asian="Arial1" style:font-size-asian="11pt" style:language-asian="es" style:country-asian="PE" style:font-name-complex="Arial1" style:font-size-complex="11pt" style:language-complex="ar" style:country-complex="SA"/>
    </style:style>
    <style:style style:name="P165" style:family="paragraph" style:parent-style-name="Standard">
      <style:paragraph-properties fo:margin-top="0.007cm" fo:margin-bottom="0cm" style:contextual-spacing="false" fo:line-height="0.247cm" fo:text-align="start" style:justify-single-word="false" fo:orphans="2" fo:widows="2"/>
      <style:text-properties style:font-name="Calibri" fo:font-size="7pt" fo:language="es" fo:country="PE" style:letter-kerning="false" style:font-name-asian="F" style:font-size-asian="7pt" style:language-asian="es" style:country-asian="PE" style:font-name-complex="F" style:font-size-complex="7pt" style:language-complex="ar" style:country-complex="SA"/>
    </style:style>
    <style:style style:name="P166" style:family="paragraph" style:parent-style-name="Standard">
      <style:paragraph-properties fo:margin-top="0.016cm" fo:margin-bottom="0cm" style:contextual-spacing="false" fo:line-height="0.247cm" fo:text-align="start" style:justify-single-word="false" fo:orphans="2" fo:widows="2"/>
      <style:text-properties style:font-name="Calibri" fo:font-size="7pt" fo:language="es" fo:country="PE" style:letter-kerning="false" style:font-name-asian="F" style:font-size-asian="7pt" style:language-asian="es" style:country-asian="PE" style:font-name-complex="F" style:font-size-complex="7pt" style:language-complex="ar" style:country-complex="SA"/>
    </style:style>
    <style:style style:name="P167" style:family="paragraph" style:parent-style-name="Standard">
      <style:paragraph-properties fo:margin-top="0.007cm" fo:margin-bottom="0cm" style:contextual-spacing="false" fo:line-height="0.247cm" fo:text-align="center" style:justify-single-word="false" fo:orphans="2" fo:widows="2"/>
      <style:text-properties style:font-name="Calibri" fo:font-size="7pt" fo:language="es" fo:country="PE" style:letter-kerning="false" style:font-name-asian="F" style:font-size-asian="7pt" style:language-asian="es" style:country-asian="PE" style:font-name-complex="F" style:font-size-complex="7pt" style:language-complex="ar" style:country-complex="SA"/>
    </style:style>
    <style:style style:name="P168" style:family="paragraph" style:parent-style-name="Standard">
      <style:paragraph-properties fo:margin-top="0.007cm" fo:margin-bottom="0cm" style:contextual-spacing="false" fo:line-height="0.247cm" fo:text-align="center" style:justify-single-word="false" fo:orphans="2" fo:widows="2"/>
      <style:text-properties style:font-name="Calibri" fo:font-size="7pt" fo:language="es" fo:country="MX" style:letter-kerning="false" style:font-name-asian="F" style:font-size-asian="7pt" style:language-asian="es" style:country-asian="PE" style:font-name-complex="F" style:font-size-complex="7pt" style:language-complex="ar" style:country-complex="SA"/>
    </style:style>
    <style:style style:name="P169" style:family="paragraph" style:parent-style-name="Standard">
      <style:paragraph-properties fo:margin-top="0.016cm" fo:margin-bottom="0cm" style:contextual-spacing="false" fo:line-height="0.494cm" fo:text-align="start" style:justify-single-word="false" fo:orphans="2" fo:widows="2"/>
      <style:text-properties style:font-name="Calibri" fo:font-size="14pt" fo:language="es" fo:country="MX" style:letter-kerning="false" style:font-name-asian="F" style:font-size-asian="14pt" style:language-asian="es" style:country-asian="PE" style:font-name-complex="F" style:font-size-complex="14pt" style:language-complex="ar" style:country-complex="SA"/>
    </style:style>
    <style:style style:name="P170" style:family="paragraph" style:parent-style-name="Standard">
      <style:paragraph-properties fo:margin-top="0.023cm" fo:margin-bottom="0cm" style:contextual-spacing="false" fo:line-height="0.494cm" fo:text-align="start" style:justify-single-word="false" fo:orphans="2" fo:widows="2"/>
      <style:text-properties style:font-name="Calibri" fo:font-size="14pt" fo:language="es" fo:country="MX" style:letter-kerning="false" style:font-name-asian="F" style:font-size-asian="14pt" style:language-asian="es" style:country-asian="PE" style:font-name-complex="F" style:font-size-complex="14pt" style:language-complex="ar" style:country-complex="SA"/>
    </style:style>
    <style:style style:name="P171" style:family="paragraph" style:parent-style-name="Standard">
      <style:paragraph-properties fo:margin-top="0.016cm" fo:margin-bottom="0cm" style:contextual-spacing="false" fo:line-height="0.494cm" fo:text-align="center" style:justify-single-word="false" fo:orphans="2" fo:widows="2"/>
      <style:text-properties style:font-name="Calibri" fo:font-size="14pt" fo:language="es" fo:country="MX" style:letter-kerning="false" style:font-name-asian="F" style:font-size-asian="14pt" style:language-asian="es" style:country-asian="PE" style:font-name-complex="F" style:font-size-complex="14pt" style:language-complex="ar" style:country-complex="SA"/>
    </style:style>
    <style:style style:name="P172" style:family="paragraph" style:parent-style-name="Standard">
      <style:paragraph-properties fo:margin-top="0.023cm" fo:margin-bottom="0cm" style:contextual-spacing="false" fo:line-height="0.494cm" fo:text-align="start" style:justify-single-word="false" fo:orphans="2" fo:widows="2"/>
      <style:text-properties style:font-name="Calibri" fo:font-size="14pt" fo:language="es" fo:country="PE" style:letter-kerning="false" style:font-name-asian="F" style:font-size-asian="14pt" style:language-asian="es" style:country-asian="PE" style:font-name-complex="F" style:font-size-complex="14pt" style:language-complex="ar" style:country-complex="SA"/>
    </style:style>
    <style:style style:name="P173" style:family="paragraph" style:parent-style-name="Standard">
      <style:paragraph-properties fo:margin-top="0cm" fo:margin-bottom="0cm" style:contextual-spacing="false" fo:line-height="100%" fo:text-align="justify" style:justify-single-word="false"/>
      <style:text-properties style:font-name-complex="Times New Roman1"/>
    </style:style>
    <style:style style:name="P174" style:family="paragraph" style:parent-style-name="Standard">
      <style:paragraph-properties fo:margin-top="0cm" fo:margin-bottom="0cm" style:contextual-spacing="false" fo:line-height="100%"/>
      <style:text-properties style:font-name-complex="Times New Roman1"/>
    </style:style>
    <style:style style:name="P175" style:family="paragraph" style:parent-style-name="Standard">
      <style:paragraph-properties fo:margin-top="0cm" fo:margin-bottom="0cm" style:contextual-spacing="false" fo:line-height="100%" fo:text-align="justify" style:justify-single-word="false"/>
      <style:text-properties fo:color="#ff0000" loext:opacity="100%" style:font-name-complex="Times New Roman1"/>
    </style:style>
    <style:style style:name="P176" style:family="paragraph" style:parent-style-name="Standard">
      <style:paragraph-properties fo:margin-left="0.635cm" fo:margin-top="0cm" fo:margin-bottom="0cm" style:contextual-spacing="false" fo:line-height="150%" fo:text-align="justify" style:justify-single-word="false"/>
    </style:style>
    <style:style style:name="P177" style:family="paragraph" style:parent-style-name="Standard">
      <style:paragraph-properties fo:margin-top="0cm" fo:margin-bottom="0cm" style:contextual-spacing="false" fo:line-height="100%" fo:text-align="center" style:justify-single-word="false"/>
      <style:text-properties fo:color="#4f81bd" loext:opacity="100%" fo:font-weight="bold" style:font-name-asian="F" style:language-asian="en" style:country-asian="US" style:font-weight-asian="bold" style:font-name-complex="Times New Roman1" style:font-weight-complex="bold">
        <loext:char-complex-color loext:theme-type="accent1" loext:color-type="theme"/>
      </style:text-properties>
    </style:style>
    <style:style style:name="P178" style:family="paragraph" style:parent-style-name="Standard">
      <style:paragraph-properties fo:margin-top="0cm" fo:margin-bottom="0cm" style:contextual-spacing="false" fo:line-height="100%" fo:text-align="justify" style:justify-single-word="false"/>
      <style:text-properties style:text-underline-style="solid" style:text-underline-width="auto" style:text-underline-color="font-color" fo:font-weight="bold" style:font-name-asian="F" style:language-asian="en" style:country-asian="US" style:font-weight-asian="bold" style:font-name-complex="Times New Roman1" style:font-weight-complex="bold"/>
    </style:style>
    <style:style style:name="P179" style:family="paragraph" style:parent-style-name="Standard">
      <style:paragraph-properties fo:margin-top="0cm" fo:margin-bottom="0cm" style:contextual-spacing="false" fo:text-align="end" style:justify-single-word="false"/>
    </style:style>
    <style:style style:name="P180" style:family="paragraph" style:parent-style-name="Standard">
      <style:paragraph-properties fo:margin-top="0cm" fo:margin-bottom="0cm" style:contextual-spacing="false" fo:line-height="100%"/>
      <style:text-properties style:font-name-asian="F" style:language-asian="en" style:country-asian="US" style:font-name-complex="Times New Roman1" style:font-weight-complex="bold"/>
    </style:style>
    <style:style style:name="P181" style:family="paragraph" style:parent-style-name="Standard">
      <style:paragraph-properties fo:margin-top="0cm" fo:margin-bottom="0cm" style:contextual-spacing="false" fo:line-height="100%" fo:text-align="justify" style:justify-single-word="false"/>
      <style:text-properties style:font-name="Arial" fo:font-size="12pt" style:rfc-language-tag="es-ES-u-co-trad" fo:language="es" fo:country="ES" style:font-name-asian="Arial Unicode MS" style:font-size-asian="12pt" style:language-asian="es" style:country-asian="ES" style:font-name-complex="Times New Roman1" style:font-size-complex="12pt"/>
    </style:style>
    <style:style style:name="P182" style:family="paragraph" style:parent-style-name="Standard">
      <style:paragraph-properties fo:margin-top="0cm" fo:margin-bottom="0cm" style:contextual-spacing="false" fo:line-height="100%"/>
      <style:text-properties style:rfc-language-tag="es-ES-u-co-trad" fo:language="es" fo:country="ES" style:language-asian="en" style:country-asian="US" style:font-name-complex="Times New Roman1"/>
    </style:style>
    <style:style style:name="P183" style:family="paragraph" style:parent-style-name="Standard">
      <style:paragraph-properties fo:margin-top="0cm" fo:margin-bottom="0cm" style:contextual-spacing="false" fo:line-height="100%"/>
      <style:text-properties fo:language="es" fo:country="ES" style:language-asian="en" style:country-asian="US" style:font-name-complex="Times New Roman1"/>
    </style:style>
    <style:style style:name="P184" style:family="paragraph" style:parent-style-name="Standard">
      <style:paragraph-properties fo:margin-left="1.27cm" fo:margin-top="0cm" fo:margin-bottom="0cm" style:contextual-spacing="false" fo:line-height="100%"/>
      <style:text-properties fo:language="es" fo:country="ES" style:language-asian="en" style:country-asian="US" style:font-name-complex="Times New Roman1"/>
    </style:style>
    <style:style style:name="P185" style:family="paragraph" style:parent-style-name="Standard">
      <style:paragraph-properties>
        <style:tab-stops>
          <style:tab-stop style:position="11.34cm"/>
        </style:tab-stops>
      </style:paragraph-properties>
    </style:style>
    <style:style style:name="P186" style:family="paragraph" style:parent-style-name="Title">
      <style:paragraph-properties fo:margin-top="0cm" fo:margin-bottom="0cm" style:contextual-spacing="true" fo:text-align="center" style:justify-single-word="false"/>
    </style:style>
    <style:style style:name="P187" style:family="paragraph">
      <loext:graphic-properties draw:fill="solid" draw:fill-color="#ffffff"/>
      <style:paragraph-properties fo:text-align="start"/>
      <style:text-properties fo:color="#ffffff" loext:opacity="100%" fo:font-size="18pt"/>
    </style:style>
    <style:style style:name="P188" style:family="paragraph">
      <loext:graphic-properties draw:fill="none"/>
      <style:paragraph-properties fo:text-align="start"/>
      <style:text-properties fo:font-size="18pt"/>
    </style:style>
    <style:style style:name="T1" style:family="text">
      <style:text-properties fo:language="es" fo:country="MX" style:language-asian="en" style:country-asian="US"/>
    </style:style>
    <style:style style:name="T2" style:family="text">
      <style:text-properties fo:language="es" fo:country="MX" style:language-asian="en" style:country-asian="US" style:font-name-complex="Times New Roman1"/>
    </style:style>
    <style:style style:name="T3" style:family="text">
      <style:text-properties fo:language="es" fo:country="MX" fo:font-weight="bold" style:font-weight-asian="bold" style:font-name-complex="Times New Roman1"/>
    </style:style>
    <style:style style:name="T4" style:family="text">
      <style:text-properties fo:language="es" fo:country="MX" fo:font-weight="bold" style:language-asian="en" style:country-asian="US" style:font-weight-asian="bold" style:font-name-complex="Times New Roman1"/>
    </style:style>
    <style:style style:name="T5" style:family="text">
      <style:text-properties fo:language="es" fo:country="MX" fo:font-weight="bold" style:font-name-asian="Arial Unicode MS" style:font-weight-asian="bold" style:font-name-complex="Arial1"/>
    </style:style>
    <style:style style:name="T6" style:family="text">
      <style:text-properties fo:language="es" fo:country="MX" style:font-name-asian="Arial Unicode MS" style:font-name-complex="Arial1"/>
    </style:style>
    <style:style style:name="T7" style:family="text">
      <style:text-properties fo:language="es" fo:country="MX" style:font-name-asian="Arial1" style:language-asian="en" style:country-asian="US" style:font-name-complex="Arial1"/>
    </style:style>
    <style:style style:name="T8" style:family="text">
      <style:text-properties fo:language="es" fo:country="MX" style:font-name-asian="Arial1" style:font-name-complex="Arial1"/>
    </style:style>
    <style:style style:name="T9" style:family="text">
      <style:text-properties style:use-window-font-color="true" loext:opacity="0%" style:font-name="Calibri" fo:font-size="12pt" fo:language="es" fo:country="MX" fo:font-weight="bold" style:font-size-asian="12pt" style:font-weight-asian="bold" style:font-name-complex="Times New Roman1" style:font-size-complex="12pt"/>
    </style:style>
    <style:style style:name="T10" style:family="text">
      <style:text-properties style:use-window-font-color="true" loext:opacity="0%" style:font-name="Calibri" fo:font-weight="normal" style:font-name-asian="Arial Unicode MS" style:language-asian="es" style:country-asian="PE" style:font-weight-asian="normal" style:font-name-complex="Arial1" style:font-weight-complex="normal"/>
    </style:style>
    <style:style style:name="T11" style:family="text">
      <style:text-properties style:use-window-font-color="true" loext:opacity="0%" style:font-name="Calibri" fo:font-size="11pt" style:font-size-asian="11pt" style:font-name-complex="Times New Roman1" style:font-size-complex="11pt"/>
    </style:style>
    <style:style style:name="T12" style:family="text">
      <style:text-properties style:use-window-font-color="true" loext:opacity="0%" style:font-name="Calibri" fo:font-size="11pt" fo:font-weight="bold" style:font-size-asian="11pt" style:font-weight-asian="bold" style:font-name-complex="Times New Roman1" style:font-size-complex="11pt"/>
    </style:style>
    <style:style style:name="T13" style:family="text">
      <style:text-properties fo:font-weight="bold" style:font-weight-asian="bold" style:font-name-complex="Times New Roman1"/>
    </style:style>
    <style:style style:name="T14" style:family="text">
      <style:text-properties fo:font-weight="bold" style:font-name-asian="Arial Unicode MS" style:font-weight-asian="bold"/>
    </style:style>
    <style:style style:name="T15" style:family="text">
      <style:text-properties fo:font-weight="bold" style:font-name-asian="Arial Unicode MS" style:font-weight-asian="bold" style:font-name-complex="Arial1"/>
    </style:style>
    <style:style style:name="T16" style:family="text">
      <style:text-properties fo:font-weight="bold" style:font-name-asian="Times New Roman1" style:font-weight-asian="bold" style:font-name-complex="Times New Roman1"/>
    </style:style>
    <style:style style:name="T17" style:family="text">
      <style:text-properties fo:font-weight="bold" style:font-name-asian="Times New Roman1" style:font-weight-asian="bold" style:font-name-complex="Times New Roman1" style:font-weight-complex="bold"/>
    </style:style>
    <style:style style:name="T18" style:family="text">
      <style:text-properties fo:font-weight="bold" style:language-asian="en" style:country-asian="US" style:font-weight-asian="bold" style:font-name-complex="Times New Roman1"/>
    </style:style>
    <style:style style:name="T19" style:family="text">
      <style:text-properties style:font-name-complex="Times New Roman1"/>
    </style:style>
    <style:style style:name="T20" style:family="text">
      <style:text-properties fo:color="#000000" loext:opacity="100%" style:font-name-asian="Times New Roman1" style:font-name-complex="Times New Roman1"/>
    </style:style>
    <style:style style:name="T21" style:family="text">
      <style:text-properties fo:color="#000000" loext:opacity="100%" fo:font-weight="bold" style:font-name-asian="Times New Roman1" style:font-weight-asian="bold" style:font-name-complex="Times New Roman1"/>
    </style:style>
    <style:style style:name="T22" style:family="text">
      <style:text-properties fo:color="#000000" loext:opacity="100%"/>
    </style:style>
    <style:style style:name="T23" style:family="text">
      <style:text-properties fo:color="#000000" loext:opacity="100%" style:font-name="Arial" style:font-name-complex="Arial1"/>
    </style:style>
    <style:style style:name="T24" style:family="text">
      <style:text-properties fo:color="#000000" loext:opacity="100%" style:font-name-complex="Arial1"/>
    </style:style>
    <style:style style:name="T25" style:family="text">
      <style:text-properties fo:color="#000000" loext:opacity="100%" fo:language="es" fo:country="ES" style:text-underline-style="solid" style:text-underline-width="auto" style:text-underline-color="font-color" fo:font-weight="bold" style:font-name-asian="Times New Roman1" style:font-weight-asian="bold" style:font-name-complex="Times New Roman1"/>
    </style:style>
    <style:style style:name="T26" style:family="text">
      <style:text-properties fo:color="#000000" loext:opacity="100%" fo:language="es" fo:country="ES" style:font-name-asian="Times New Roman1" style:font-name-complex="Times New Roman1"/>
    </style:style>
    <style:style style:name="T27" style:family="text">
      <style:text-properties fo:color="#000000" loext:opacity="100%" style:rfc-language-tag="es-ES-u-co-trad" fo:language="es" fo:country="ES" fo:font-weight="bold" style:font-name-asian="Times New Roman1" style:font-weight-asian="bold" style:font-name-complex="Times New Roman1"/>
    </style:style>
    <style:style style:name="T28" style:family="text">
      <style:text-properties fo:color="#000000" loext:opacity="100%" style:rfc-language-tag="es-ES-u-co-trad" fo:language="es" fo:country="ES" style:font-name-asian="Times New Roman1" style:font-name-complex="Times New Roman1"/>
    </style:style>
    <style:style style:name="T29" style:family="text">
      <style:text-properties fo:color="#000000" loext:opacity="100%" style:rfc-language-tag="es-ES-u-co-trad" fo:language="es" fo:country="ES" style:text-underline-style="solid" style:text-underline-width="auto" style:text-underline-color="font-color" fo:font-weight="bold" style:font-name-asian="Times New Roman1" style:font-weight-asian="bold" style:font-name-complex="Times New Roman1"/>
    </style:style>
    <style:style style:name="T30" style:family="text">
      <style:text-properties style:rfc-language-tag="es-ES-u-co-trad" fo:language="es" fo:country="ES" fo:font-weight="bold" style:font-name-asian="Arial Unicode MS" style:font-weight-asian="bold"/>
    </style:style>
    <style:style style:name="T31" style:family="text">
      <style:text-properties style:rfc-language-tag="es-ES-u-co-trad" fo:language="es" fo:country="ES" style:language-asian="en" style:country-asian="US" style:font-name-complex="Times New Roman1"/>
    </style:style>
    <style:style style:name="T32" style:family="text">
      <style:text-properties style:font-name-asian="Arial Unicode MS"/>
    </style:style>
    <style:style style:name="T33" style:family="text">
      <style:text-properties style:font-name-asian="Arial Unicode MS" style:font-name-complex="Arial1"/>
    </style:style>
    <style:style style:name="T34" style:family="text">
      <style:text-properties style:font-name-asian="Arial Unicode MS" style:language-asian="en" style:country-asian="US"/>
    </style:style>
    <style:style style:name="T35" style:family="text">
      <style:text-properties style:font-name-asian="Times New Roman1" style:font-name-complex="Times New Roman1"/>
    </style:style>
    <style:style style:name="T36" style:family="text">
      <style:text-properties style:text-underline-style="solid" style:text-underline-width="auto" style:text-underline-color="font-color" fo:font-weight="bold" style:font-weight-asian="bold" style:font-name-complex="Times New Roman1"/>
    </style:style>
    <style:style style:name="T37" style:family="text">
      <style:text-properties style:text-underline-style="solid" style:text-underline-width="auto" style:text-underline-color="font-color" fo:font-weight="bold" style:font-name-asian="F" style:language-asian="en" style:country-asian="US" style:font-weight-asian="bold" style:font-name-complex="Times New Roman1" style:font-weight-complex="bold"/>
    </style:style>
    <style:style style:name="T38" style:family="text">
      <style:text-properties style:text-underline-style="solid" style:text-underline-width="auto" style:text-underline-color="font-color" style:language-asian="en" style:country-asian="US" style:font-name-complex="Times New Roman1"/>
    </style:style>
    <style:style style:name="T39" style:family="text">
      <style:text-properties style:text-underline-style="solid" style:text-underline-width="auto" style:text-underline-color="font-color" style:font-name-complex="Times New Roman1"/>
    </style:style>
    <style:style style:name="T40" style:family="text">
      <style:text-properties style:language-asian="en" style:country-asian="US"/>
    </style:style>
    <style:style style:name="T41" style:family="text">
      <style:text-properties style:language-asian="en" style:country-asian="US" style:font-name-complex="Times New Roman1"/>
    </style:style>
    <style:style style:name="T42" style:family="text">
      <style:text-properties fo:color="#4f81bd" loext:opacity="100%" fo:font-weight="bold" style:font-name-asian="F" style:font-weight-asian="bold" style:font-name-complex="Times New Roman1" style:font-weight-complex="bold">
        <loext:char-complex-color loext:theme-type="accent1" loext:color-type="theme"/>
      </style:text-properties>
    </style:style>
    <style:style style:name="T43" style:family="text">
      <style:text-properties fo:color="#4f81bd" loext:opacity="100%" fo:font-weight="bold" style:font-name-asian="F" style:language-asian="en" style:country-asian="US" style:font-weight-asian="bold" style:font-name-complex="Times New Roman1" style:font-weight-complex="bold">
        <loext:char-complex-color loext:theme-type="accent1" loext:color-type="theme"/>
      </style:text-properties>
    </style:style>
    <style:style style:name="T44" style:family="text">
      <style:text-properties fo:letter-spacing="0.002cm" fo:language="es" fo:country="MX" style:font-name-asian="Arial1" style:language-asian="en" style:country-asian="US" style:font-name-complex="Arial1"/>
    </style:style>
    <style:style style:name="T45" style:family="text">
      <style:text-properties fo:letter-spacing="0.002cm" fo:language="es" fo:country="MX" style:font-name-asian="Arial1" style:font-name-complex="Arial1"/>
    </style:style>
    <style:style style:name="T46" style:family="text">
      <style:text-properties fo:letter-spacing="0.002cm" style:font-name-asian="Arial1" style:language-asian="en" style:country-asian="US" style:font-name-complex="Arial1"/>
    </style:style>
    <style:style style:name="T47" style:family="text">
      <style:text-properties fo:letter-spacing="0.002cm" style:font-name-asian="Arial1" style:font-name-complex="Arial1"/>
    </style:style>
    <style:style style:name="T48" style:family="text">
      <style:text-properties fo:letter-spacing="0.002cm" style:font-name-asian="Arial1" style:font-name-complex="Arial1" fo:background-color="#ffff00"/>
    </style:style>
    <style:style style:name="T49" style:family="text">
      <style:text-properties fo:letter-spacing="0.002cm" fo:language="en" fo:country="US" style:font-name-asian="Arial1" style:language-asian="en" style:country-asian="US" style:font-name-complex="Arial1"/>
    </style:style>
    <style:style style:name="T50" style:family="text">
      <style:text-properties fo:letter-spacing="0.004cm" fo:language="es" fo:country="MX" style:font-name-asian="Arial1" style:language-asian="en" style:country-asian="US" style:font-name-complex="Arial1"/>
    </style:style>
    <style:style style:name="T51" style:family="text">
      <style:text-properties fo:letter-spacing="0.004cm" fo:language="es" fo:country="MX" style:font-name-asian="Arial1" style:font-name-complex="Arial1"/>
    </style:style>
    <style:style style:name="T52" style:family="text">
      <style:text-properties fo:letter-spacing="0.004cm" style:font-name-asian="Arial1" style:language-asian="en" style:country-asian="US" style:font-name-complex="Arial1"/>
    </style:style>
    <style:style style:name="T53" style:family="text">
      <style:text-properties fo:letter-spacing="0.004cm" style:font-name-asian="Arial1" style:font-name-complex="Arial1"/>
    </style:style>
    <style:style style:name="T54" style:family="text">
      <style:text-properties fo:letter-spacing="0.004cm" fo:language="en" fo:country="US" style:font-name-asian="Arial1" style:language-asian="en" style:country-asian="US" style:font-name-complex="Arial1"/>
    </style:style>
    <style:style style:name="T55" style:family="text">
      <style:text-properties fo:letter-spacing="-0.002cm" fo:language="es" fo:country="MX" style:font-name-asian="Arial1" style:language-asian="en" style:country-asian="US" style:font-name-complex="Arial1"/>
    </style:style>
    <style:style style:name="T56" style:family="text">
      <style:text-properties fo:letter-spacing="-0.002cm" fo:language="es" fo:country="MX" style:font-name-asian="Arial1" style:font-name-complex="Arial1"/>
    </style:style>
    <style:style style:name="T57" style:family="text">
      <style:text-properties fo:letter-spacing="-0.002cm" style:font-name-asian="Arial1" style:language-asian="en" style:country-asian="US" style:font-name-complex="Arial1"/>
    </style:style>
    <style:style style:name="T58" style:family="text">
      <style:text-properties fo:letter-spacing="-0.002cm" style:font-name-asian="Arial1" style:font-name-complex="Arial1"/>
    </style:style>
    <style:style style:name="T59" style:family="text">
      <style:text-properties fo:letter-spacing="-0.002cm" fo:language="en" fo:country="US" style:font-name-asian="Arial1" style:language-asian="en" style:country-asian="US" style:font-name-complex="Arial1"/>
    </style:style>
    <style:style style:name="T60" style:family="text">
      <style:text-properties fo:letter-spacing="-0.009cm" fo:language="es" fo:country="MX" style:font-name-asian="Arial1" style:language-asian="en" style:country-asian="US" style:font-name-complex="Arial1"/>
    </style:style>
    <style:style style:name="T61" style:family="text">
      <style:text-properties fo:letter-spacing="-0.009cm" fo:language="es" fo:country="MX" style:font-name-asian="Arial1" style:font-name-complex="Arial1"/>
    </style:style>
    <style:style style:name="T62" style:family="text">
      <style:text-properties fo:letter-spacing="-0.009cm" style:font-name-asian="Arial1" style:language-asian="en" style:country-asian="US" style:font-name-complex="Arial1"/>
    </style:style>
    <style:style style:name="T63" style:family="text">
      <style:text-properties fo:letter-spacing="-0.009cm" style:font-name-asian="Arial1" style:font-name-complex="Arial1"/>
    </style:style>
    <style:style style:name="T64" style:family="text">
      <style:text-properties fo:letter-spacing="-0.009cm" fo:language="en" fo:country="US" style:font-name-asian="Arial1" style:language-asian="en" style:country-asian="US" style:font-name-complex="Arial1"/>
    </style:style>
    <style:style style:name="T65" style:family="text">
      <style:text-properties fo:letter-spacing="0.009cm" fo:language="es" fo:country="MX" style:font-name-asian="Arial1" style:language-asian="en" style:country-asian="US" style:font-name-complex="Arial1"/>
    </style:style>
    <style:style style:name="T66" style:family="text">
      <style:text-properties fo:letter-spacing="0.009cm" fo:language="es" fo:country="MX" style:font-name-asian="Arial1" style:font-name-complex="Arial1"/>
    </style:style>
    <style:style style:name="T67" style:family="text">
      <style:text-properties fo:letter-spacing="0.009cm" style:font-name-asian="Arial1" style:font-name-complex="Arial1"/>
    </style:style>
    <style:style style:name="T68" style:family="text">
      <style:text-properties fo:letter-spacing="-0.011cm" fo:language="es" fo:country="MX" style:font-name-asian="Arial1" style:language-asian="en" style:country-asian="US" style:font-name-complex="Arial1"/>
    </style:style>
    <style:style style:name="T69" style:family="text">
      <style:text-properties fo:letter-spacing="-0.011cm" style:font-name-asian="Arial1" style:font-name-complex="Arial1"/>
    </style:style>
    <style:style style:name="T70" style:family="text">
      <style:text-properties fo:letter-spacing="-0.011cm" fo:language="en" fo:country="US" style:font-name-asian="Arial1" style:language-asian="en" style:country-asian="US" style:font-name-complex="Arial1"/>
    </style:style>
    <style:style style:name="T71" style:family="text">
      <style:text-properties fo:letter-spacing="-0.004cm" fo:language="es" fo:country="MX" style:font-name-asian="Arial1" style:language-asian="en" style:country-asian="US" style:font-name-complex="Arial1"/>
    </style:style>
    <style:style style:name="T72" style:family="text">
      <style:text-properties fo:letter-spacing="-0.004cm" fo:language="es" fo:country="MX" style:font-name-asian="Arial1" style:font-name-complex="Arial1"/>
    </style:style>
    <style:style style:name="T73" style:family="text">
      <style:text-properties fo:letter-spacing="-0.004cm" style:font-name-asian="Arial1" style:language-asian="en" style:country-asian="US" style:font-name-complex="Arial1"/>
    </style:style>
    <style:style style:name="T74" style:family="text">
      <style:text-properties fo:letter-spacing="-0.004cm" style:font-name-asian="Arial1" style:font-name-complex="Arial1"/>
    </style:style>
    <style:style style:name="T75" style:family="text">
      <style:text-properties fo:letter-spacing="-0.004cm" fo:language="en" fo:country="US" style:font-name-asian="Arial1" style:language-asian="en" style:country-asian="US" style:font-name-complex="Arial1"/>
    </style:style>
    <style:style style:name="T76" style:family="text">
      <style:text-properties style:font-name="Times New Roman" fo:font-size="7pt" fo:language="es" fo:country="MX" style:font-size-asian="7pt" style:language-asian="en" style:country-asian="US" style:font-size-complex="7pt"/>
    </style:style>
    <style:style style:name="T77" style:family="text">
      <style:text-properties style:font-name="Times New Roman" fo:font-size="10pt" fo:language="es" fo:country="MX" style:font-size-asian="10pt" style:language-asian="en" style:country-asian="US" style:font-size-complex="10pt"/>
    </style:style>
    <style:style style:name="T78" style:family="text">
      <style:text-properties style:font-name="Times New Roman" fo:font-size="10pt" style:font-size-asian="10pt" style:language-asian="en" style:country-asian="US" style:font-size-complex="10pt"/>
    </style:style>
    <style:style style:name="T79" style:family="text">
      <style:text-properties style:font-name="Times New Roman" fo:language="es" fo:country="MX" style:language-asian="en" style:country-asian="US"/>
    </style:style>
    <style:style style:name="T80" style:family="text">
      <style:text-properties style:font-name="Times New Roman" style:language-asian="en" style:country-asian="US"/>
    </style:style>
    <style:style style:name="T81" style:family="text">
      <style:text-properties style:font-name="Times New Roman" fo:font-size="8pt" fo:language="en" fo:country="US" style:font-size-asian="8pt" style:language-asian="en" style:country-asian="US" style:font-size-complex="8pt"/>
    </style:style>
    <style:style style:name="T82" style:family="text">
      <style:text-properties style:font-name="Times New Roman" fo:font-size="8pt" fo:language="es" fo:country="MX" style:font-size-asian="8pt" style:language-asian="en" style:country-asian="US" style:font-size-complex="8pt"/>
    </style:style>
    <style:style style:name="T83" style:family="text">
      <style:text-properties style:font-name="Times New Roman" fo:font-size="14pt" fo:language="en" fo:country="US" style:font-size-asian="14pt" style:language-asian="en" style:country-asian="US" style:font-size-complex="14pt"/>
    </style:style>
    <style:style style:name="T84" style:family="text">
      <style:text-properties style:font-name-asian="Arial1" style:language-asian="en" style:country-asian="US" style:font-name-complex="Arial1"/>
    </style:style>
    <style:style style:name="T85" style:family="text">
      <style:text-properties style:font-name-asian="Arial1" style:font-name-complex="Arial1"/>
    </style:style>
    <style:style style:name="T86" style:family="text">
      <style:text-properties style:font-name-asian="Arial1" style:font-name-complex="Arial1" fo:background-color="#ffff00"/>
    </style:style>
    <style:style style:name="T87" style:family="text">
      <style:text-properties fo:letter-spacing="-0.005cm" fo:language="en" fo:country="US" style:font-name-asian="Arial1" style:language-asian="en" style:country-asian="US" style:font-name-complex="Arial1"/>
    </style:style>
    <style:style style:name="T88" style:family="text">
      <style:text-properties fo:letter-spacing="-0.005cm" fo:language="es" fo:country="MX" style:font-name-asian="Arial1" style:font-name-complex="Arial1"/>
    </style:style>
    <style:style style:name="T89" style:family="text">
      <style:text-properties fo:letter-spacing="-0.005cm" style:font-name-asian="Arial1" style:font-name-complex="Arial1"/>
    </style:style>
    <style:style style:name="T90" style:family="text">
      <style:text-properties fo:language="en" fo:country="US" style:font-name-asian="Arial1" style:language-asian="en" style:country-asian="US" style:font-name-complex="Arial1"/>
    </style:style>
    <style:style style:name="T91" style:family="text">
      <style:text-properties fo:font-size="7pt" style:font-size-asian="7pt" style:font-size-complex="7pt"/>
    </style:style>
    <style:style style:name="T92" style:family="text">
      <style:text-properties fo:font-size="7pt" fo:language="es" fo:country="MX" style:font-size-asian="7pt" style:font-size-complex="7pt"/>
    </style:style>
    <style:style style:name="T93" style:family="text">
      <style:text-properties fo:font-size="14pt" fo:language="es" fo:country="MX" style:font-size-asian="14pt" style:font-size-complex="14pt"/>
    </style:style>
    <style:style style:name="T94" style:family="text">
      <style:text-properties fo:font-size="14pt" style:font-size-asian="14pt" style:font-size-complex="14pt"/>
    </style:style>
    <style:style style:name="T95" style:family="text">
      <style:text-properties fo:letter-spacing="0.005cm" fo:language="es" fo:country="MX" style:font-name-asian="Arial1" style:font-name-complex="Arial1"/>
    </style:style>
    <style:style style:name="T96" style:family="text">
      <style:text-properties fo:letter-spacing="0.005cm" fo:language="es" fo:country="MX" style:font-name-asian="Arial1" style:language-asian="en" style:country-asian="US" style:font-name-complex="Arial1"/>
    </style:style>
    <style:style style:name="T97" style:family="text">
      <style:text-properties fo:color="#ff0000" loext:opacity="100%" style:font-name-complex="Times New Roman1"/>
    </style:style>
    <style:style style:name="T98" style:family="text">
      <style:text-properties fo:color="#1d1b11" loext:opacity="100%" style:font-name="Arial Narrow" fo:font-size="8pt" fo:font-weight="bold" style:font-size-asian="8pt" style:font-weight-asian="bold" style:font-size-complex="8pt">
        <loext:char-complex-color loext:theme-type="light2" loext:color-type="theme">
          <loext:transformation loext:type="shade" loext:value="8980"/>
        </loext:char-complex-color>
      </style:text-properties>
    </style:style>
    <style:style style:name="T99" style:family="text">
      <style:text-properties fo:color="#1d1b11" loext:opacity="100%" style:font-name="Arial Narrow" fo:font-weight="bold" style:font-weight-asian="bold">
        <loext:char-complex-color loext:theme-type="light2" loext:color-type="theme">
          <loext:transformation loext:type="shade" loext:value="8980"/>
        </loext:char-complex-color>
      </style:text-properties>
    </style:style>
    <style:style style:name="T100" style:family="text">
      <style:text-properties style:font-name="Calibri" fo:font-size="11pt" fo:font-weight="bold" style:font-size-asian="11pt" style:font-weight-asian="bold" style:font-name-complex="Times New Roman1" style:font-size-complex="11pt"/>
    </style:style>
    <style:style style:name="T101" style:family="text">
      <style:text-properties style:font-name="Calibri" fo:font-size="11pt" style:font-size-asian="11pt" style:font-name-complex="Times New Roman1" style:font-size-complex="11pt"/>
    </style:style>
    <style:style style:name="T102" style:family="text">
      <style:text-properties style:font-name="Arial" fo:font-size="9pt" style:font-size-asian="9pt" style:font-name-complex="Arial1" style:font-size-complex="9pt"/>
    </style:style>
    <style:style style:name="T103" style:family="text">
      <style:text-properties style:font-name="Arial" fo:font-size="10pt" style:font-size-asian="10pt" style:font-name-complex="Arial1" style:font-size-complex="10pt"/>
    </style:style>
    <style:style style:name="T104" style:family="text">
      <style:text-properties style:font-name="Arial" fo:font-size="12pt" style:rfc-language-tag="es-ES-u-co-trad" fo:language="es" fo:country="ES" style:font-name-asian="Arial Unicode MS" style:font-size-asian="12pt" style:language-asian="es" style:country-asian="ES" style:font-name-complex="Times New Roman1" style:font-size-complex="12pt"/>
    </style:style>
    <style:style style:name="T105" style:family="text">
      <style:text-properties style:font-name="Arial" fo:font-size="8pt" fo:font-style="italic" style:font-size-asian="8pt" style:font-style-asian="italic" style:font-name-complex="Arial1" style:font-size-complex="9pt"/>
    </style:style>
    <style:style style:name="T106" style:family="text">
      <style:text-properties style:font-name-asian="F" style:language-asian="en" style:country-asian="US" style:font-name-complex="Times New Roman1" style:font-weight-complex="bold"/>
    </style:style>
    <style:style style:name="T107" style:family="text">
      <style:text-properties fo:language="es" fo:country="ES" style:language-asian="en" style:country-asian="US" style:font-name-complex="Times New Roman1"/>
    </style:style>
    <style:style style:name="T108" style:family="text">
      <style:text-properties fo:font-size="10pt" style:font-size-asian="10pt"/>
    </style:style>
    <style:style style:name="T109" style:family="text">
      <style:text-properties fo:color="#000000" loext:opacity="100%" style:font-name="Arial Narrow" style:font-name-complex="Arial1">
        <loext:char-complex-color loext:theme-type="dark1" loext:color-type="theme"/>
      </style:text-properties>
    </style:style>
    <style:style style:name="T110" style:family="text">
      <style:text-properties fo:color="#000000" loext:opacity="100%" style:font-name="Calibri" fo:font-weight="normal" style:font-name-asian="Times New Roman1" style:language-asian="es" style:country-asian="PE" style:font-weight-asian="normal" style:font-name-complex="Times New Roman1" style:font-weight-complex="normal"/>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gr1" style:family="graphic" style:parent-style-name="Frame">
      <style:graphic-properties draw:stroke="solid" svg:stroke-width="0.071cm" svg:stroke-color="#3a5f8b" svg:stroke-linecap="butt" draw:fill="solid" draw:fill-color="#ffffff" draw:textarea-vertical-align="middle" draw:auto-grow-height="false" fo:min-height="1.348cm" fo:min-width="2.034cm" fo:padding-top="0.127cm" fo:padding-bottom="0.127cm" fo:padding-left="0.254cm" fo:padding-right="0.254cm" fo:wrap-option="wrap" loext:decorative="false" fo:margin-left="0cm" fo:margin-right="0.053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2" style:family="graphic" style:parent-style-name="Frame">
      <style:graphic-properties draw:stroke="solid" svg:stroke-width="0.071cm" svg:stroke-color="#3a5f8b" svg:stroke-linecap="butt" draw:fill="solid" draw:fill-color="#ffffff" draw:textarea-vertical-align="middle" draw:auto-grow-height="false" fo:min-height="1.457cm" fo:min-width="1.967cm" fo:padding-top="0.127cm" fo:padding-bottom="0.127cm" fo:padding-left="0.254cm" fo:padding-right="0.254cm" fo:wrap-option="wrap" loext:decorative="false" fo:margin-left="0cm" fo:margin-right="0.067cm" fo:margin-top="0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dash" draw:stroke-dash="Long_20_Dash" svg:stroke-width="0.053cm" svg:stroke-color="#ff0000" draw:marker-end="msArrowEnd_20_5" draw:marker-end-width="0.21cm" draw:marker-end-center="false" svg:stroke-linecap="butt" draw:fill="none" loext:fill-use-slide-background="false" draw:textarea-vertical-align="top" draw:auto-grow-height="false" fo:min-height="0cm" fo:min-width="5.203cm" fo:padding-top="0.125cm" fo:padding-bottom="0.125cm" fo:padding-left="0.25cm" fo:padding-right="0.25cm" fo:wrap-option="wrap" loext:decorative="false" fo:margin-left="0cm" fo:margin-right="0.065cm" fo:margin-top="0.159cm" fo:margin-bottom="0.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71cm" svg:stroke-color="#3a5f8b" svg:stroke-linecap="butt" draw:fill="solid" draw:fill-color="#ffffff" draw:textarea-vertical-align="middle" draw:auto-grow-height="false" fo:min-height="1.106cm" fo:min-width="1.083cm" fo:padding-top="0.127cm" fo:padding-bottom="0.127cm" fo:padding-left="0.254cm" fo:padding-right="0.254cm" fo:wrap-option="wrap" loext:decorative="false" fo:margin-left="0cm" fo:margin-right="0.051cm" fo:margin-top="0cm" fo:margin-bottom="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loext:marker-style-name="T1"/>
      <text:p text:style-name="P186" loext:marker-style-name="T9"><text:span text:style-name="T9">FORMATO 12</text:span><text:span text:style-name="T9"/></text:p>
      <text:p text:style-name="P186" loext:marker-style-name="T9"><text:span text:style-name="T9"><text:s/>FICHA DE REGISTRO DEL PLAN DE NEGOCIO AMBAS CATEGORIAS (“A” y “B”)</text:span><text:span text:style-name="T9"/></text:p>
      <text:list text:style-name="WWNum5">
        <text:list-item>
          <text:p text:style-name="P58" loext:marker-style-name="T13"><text:span text:style-name="T13">ASPECTOS GENERALES </text:span><text:span text:style-name="T13"/></text:p>
        </text:list-item>
      </text:list>
      <text:p text:style-name="P71" loext:marker-style-name="T19"/>
      <text:list text:continue-numbering="true" text:style-name="WWNum5">
        <text:list-item>
          <text:list>
            <text:list-item>
              <text:p text:style-name="P60" loext:marker-style-name="T3"><text:span text:style-name="T3">DATOS GENERALES</text:span><text:span text:style-name="T3"/></text:p>
            </text:list-item>
          </text:list>
        </text:list-item>
      </text:list>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0" loext:marker-style-name="T20"><text:span text:style-name="T20">Nombre de la Propuesta Productiva</text:span><text:span text:style-name="T20"/></text:p>
          </table:table-cell>
          <table:table-cell table:style-name="Tabla1.B1" office:value-type="string">
            <text:p text:style-name="P91" loext:marker-style-name="T20"><text:span text:style-name="T20"> </text:span><text:span text:style-name="T30">“MEJORAMIENTO DE LA PRODUCCIÓN Y COMERCIALIZACIÓN DE CUYES EN LA ASOCIACIÓN <text:s/>AGROPECUARIO <text:s/>DE PAMPARQUE DEL DISTRITO DE PUQUIO, PROVINCIA DE LUCANAS-AYACUCHO”.</text:span></text:p>
          </table:table-cell>
          <table:table-cell table:style-name="Tabla1.C1" office:value-type="string">
            <text:p text:style-name="P90" loext:marker-style-name="T20"><text:span text:style-name="T20"/></text:p>
          </table:table-cell>
          <table:table-cell table:style-name="Tabla1.D1" office:value-type="string">
            <text:p text:style-name="P90" loext:marker-style-name="T20"><text:span text:style-name="T20"/></text:p>
          </table:table-cell>
        </table:table-row>
        <table:table-row table:style-name="Tabla1.2">
          <table:table-cell table:style-name="Tabla1.A1" office:value-type="string">
            <text:p text:style-name="P98" loext:marker-style-name="T20"/>
          </table:table-cell>
          <table:table-cell table:style-name="Tabla1.A1" office:value-type="string">
            <text:p text:style-name="P98" loext:marker-style-name="T20"/>
          </table:table-cell>
          <table:table-cell table:style-name="Tabla1.A1" office:value-type="string">
            <text:p text:style-name="P98" loext:marker-style-name="T20"/>
          </table:table-cell>
          <table:table-cell table:style-name="Tabla1.A1" office:value-type="string">
            <text:p text:style-name="P98" loext:marker-style-name="T20"/>
          </table:table-cell>
        </table:table-row>
        <table:table-row table:style-name="Tabla1.1">
          <table:table-cell table:style-name="Tabla1.A1" office:value-type="string">
            <text:p text:style-name="P90" loext:marker-style-name="T20"><text:span text:style-name="T20">Monto Total de Inversión</text:span><text:span text:style-name="T20"/></text:p>
          </table:table-cell>
          <table:table-cell table:style-name="Tabla1.B1" office:value-type="string">
            <text:p text:style-name="P90" loext:marker-style-name="T20"><text:span text:style-name="T20"> 140,058.57</text:span><text:span text:style-name="T20"/></text:p>
          </table:table-cell>
          <table:table-cell table:style-name="Tabla1.C1" office:value-type="string">
            <text:p text:style-name="P90" loext:marker-style-name="T20"><text:span text:style-name="T20"/></text:p>
          </table:table-cell>
          <table:table-cell table:style-name="Tabla1.D1" office:value-type="string">
            <text:p text:style-name="P90" loext:marker-style-name="T20"><text:span text:style-name="T20"/></text:p>
          </table:table-cell>
        </table:table-row>
        <table:table-row table:style-name="Tabla1.2">
          <table:table-cell table:style-name="Tabla1.A1" office:value-type="string">
            <text:p text:style-name="P98" loext:marker-style-name="T20"/>
          </table:table-cell>
          <table:table-cell table:style-name="Tabla1.A1" office:value-type="string">
            <text:p text:style-name="P98" loext:marker-style-name="T20"/>
          </table:table-cell>
          <table:table-cell table:style-name="Tabla1.A1" office:value-type="string">
            <text:p text:style-name="P98" loext:marker-style-name="T20"/>
          </table:table-cell>
          <table:table-cell table:style-name="Tabla1.A1" office:value-type="string">
            <text:p text:style-name="P98" loext:marker-style-name="T20"/>
          </table:table-cell>
        </table:table-row>
        <table:table-row table:style-name="Tabla1.1">
          <table:table-cell table:style-name="Tabla1.A1" office:value-type="string">
            <text:p text:style-name="P90" loext:marker-style-name="T20"><text:span text:style-name="T20">Cofinanciamiento solicitado</text:span><text:span text:style-name="T20"/></text:p>
          </table:table-cell>
          <table:table-cell table:style-name="Tabla1.B1" office:value-type="string">
            <text:p text:style-name="P90" loext:marker-style-name="T20"><text:span text:style-name="T20"> 109,363.12</text:span><text:span text:style-name="T20"/></text:p>
          </table:table-cell>
          <table:table-cell table:style-name="Tabla1.C1" office:value-type="string">
            <text:p text:style-name="P90" loext:marker-style-name="T20"><text:span text:style-name="T20"/></text:p>
          </table:table-cell>
          <table:table-cell table:style-name="Tabla1.D1" office:value-type="string">
            <text:p text:style-name="P90" loext:marker-style-name="T20"><text:span text:style-name="T20"/></text:p>
          </table:table-cell>
        </table:table-row>
      </table:table>
      <text:p text:style-name="P74" loext:marker-style-name="T3"/>
      <text:list text:continue-numbering="true" text:style-name="WWNum5">
        <text:list-item>
          <text:list>
            <text:list-item>
              <text:p text:style-name="P60" loext:marker-style-name="T3"><text:span text:style-name="T3">Responsables de la Formulación</text:span><text:span text:style-name="T3"/></text:p>
            </text:list-item>
          </text:list>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4" loext:marker-style-name="T4"><text:span text:style-name="T4">Nombres y apellidos</text:span><text:span text:style-name="T4"/></text:p>
          </table:table-cell>
          <table:table-cell table:style-name="Tabla2.A1" office:value-type="string">
            <text:p text:style-name="P94" loext:marker-style-name="T4"><text:span text:style-name="T4">Cargo</text:span><text:span text:style-name="T4"/></text:p>
          </table:table-cell>
          <table:table-cell table:style-name="Tabla2.A1" office:value-type="string">
            <text:p text:style-name="P94" loext:marker-style-name="T4"><text:span text:style-name="T4">DNI</text:span><text:span text:style-name="T4"/></text:p>
          </table:table-cell>
        </table:table-row>
        <table:table-row table:style-name="Tabla2.2">
          <table:table-cell table:style-name="Tabla2.A1" office:value-type="string">
            <text:p text:style-name="P90" loext:marker-style-name="T2"><text:span text:style-name="T2">Edex Palomino Cuba</text:span></text:p>
          </table:table-cell>
          <table:table-cell table:style-name="Tabla2.A1" office:value-type="string">
            <text:p text:style-name="P90" loext:marker-style-name="T2"><text:span text:style-name="T2">Proyectista</text:span><text:span text:style-name="T2"/></text:p>
          </table:table-cell>
          <table:table-cell table:style-name="Tabla2.A1" office:value-type="string">
            <text:p text:style-name="P90" loext:marker-style-name="T2"><text:span text:style-name="T2">29101439</text:span><text:span text:style-name="T2"/></text:p>
          </table:table-cell>
        </table:table-row>
      </table:table>
      <text:p text:style-name="P89" loext:marker-style-name="T3"/>
      <text:list text:continue-numbering="true" text:style-name="WWNum5">
        <text:list-item>
          <text:list>
            <text:list-item>
              <text:p text:style-name="P60" loext:marker-style-name="T3"><text:span text:style-name="T3">Antecedente</text:span><text:span text:style-name="T3"/></text:p>
            </text:list-item>
          </text:list>
        </text:list-item>
      </text:list>
      <table:table table:name="Tabla3" table:style-name="Tabla3">
        <table:table-column table:style-name="Tabla3.A"/>
        <table:table-row table:style-name="Tabla3.1">
          <table:table-cell table:style-name="Tabla3.A1" office:value-type="string">
            <text:p text:style-name="P104" loext:marker-style-name="T33"><text:span text:style-name="T20"><text:s/></text:span><text:span text:style-name="T33">La Sexta Disposición Complementaria Final del Decreto Legislativo N° 1252, dispone que los procedimientos y metodologías para la implementación, ejecución y evaluación del impacto de las Iniciativas de Apoyo a la Competitividad Productiva, reguladas por la Ley N° 29337, son emitidos por el Ministerio de la Producción; debiendo los Gobiernos Regionales y Gobiernos Locales informar a dicho Ministerio sobre las Iniciativas que autoricen a través de las oficinas, órganos o comités que dispongan para tales efectos.</text:span></text:p>
            <text:p text:style-name="P104" loext:marker-style-name="T33"><text:span text:style-name="T33">Con Memorando N° 1094-2017-PRODUCE/DVMYPE-I, de fecha 26 de junio del 2017, el Viceministerio de MYPE e Industria delega en la Dirección General de Desarrollo Empresarial la responsabilidad de definir los procedimientos y metodologías para la implementación, ejecución y evaluación del impacto de PROCOMPITE, así como la coordinación con Gobiernos Regionales y Locales para que informen sobre las iniciativas que autoricen a través de las oficinas, órganos o comités que dispongan para tales efectos.</text:span><text:span text:style-name="T33"/></text:p>
            <text:p text:style-name="P104" loext:marker-style-name="T33"><text:span text:style-name="T33">El Gobierno Regional de Ayacucho, mediante Acuerdo de Consejo Regional N° 138-2019- GRA/CR, aprobó la implementación del PROCOMPITE Regional Ayacucho 2020, destinando el monto de S/. 10,000,000 (Diez Millones con 00/100 soles).</text:span><text:span text:style-name="T33"/></text:p>
            <text:p text:style-name="P104" loext:marker-style-name="T33"><text:span text:style-name="T33">La Gerencia Regional de Desarrollo Económico del GRA, realizado la convocatoria del PROCOMPITE REGIONAL Ayacucho 2020, de acuerdo al cronograma, bases y la priorización de 11 cadenas productivas: Cuyes – Abejas, Quinua, Servicios Turísticos, Tara, Alpacas-Vicuñas, Derivados Lácteos, Papa Nativa, Palta, Artesanía Cacao – Café y Trucha.</text:span><text:span text:style-name="T33"/></text:p>
            <text:h text:style-name="P57" text:outline-level="3" loext:marker-style-name="T20"><text:span text:style-name="T10">La Asociación Agropecuaria de Pamparque, fue constituida el 18 de mayo 2019 , iniciando con 11 integrantes, cuya inscripción en registros públicos con partida N° 11052647 y con fecha de 11 de junio actualiza 31 socios para la participación en el Fondo Concursable del PROCOMPITE REGIONAL AYACUCHO 2020, cabe mencionar que se dedican a la actividad agropecuaria, como principal fuente de ingresos económicos para el sustento de la familia, la crianza de cuyes, ya desde tiempos ancestrales constituye una fuente importante de sustento de la dieta alimentaria e ingresos económicos, sin embargo, la baja producción y productividad por causas de un inadecuado sistema de producción solo es para el autoconsumo con mínimo excedente para la comercialización.</text:span><text:span text:style-name="T110"/></text:h>
          </table:table-cell>
        </table:table-row>
      </table:table>
      <text:p text:style-name="P74" loext:marker-style-name="T3"/>
      <text:list xml:id="list23958325103887" text:continue-numbering="true" text:style-name="WWNum5">
        <text:list-item>
          <text:list>
            <text:list-item>
              <text:p text:style-name="P60" loext:marker-style-name="T3"><text:span text:style-name="T3">Justificación</text:span><text:span text:style-name="T3"/></text:p>
            </text:list-item>
          </text:list>
        </text:list-item>
      </text:list>
      <table:table table:name="Tabla4" table:style-name="Tabla4">
        <table:table-column table:style-name="Tabla4.A"/>
        <text:soft-page-break/>
        <table:table-row table:style-name="Tabla4.1">
          <table:table-cell table:style-name="Tabla4.A1" table:number-rows-spanned="2" office:value-type="string">
            <text:p text:style-name="P104" loext:marker-style-name="T33"><text:span text:style-name="T33">Según el análisis de la cadena productiva de animales menores (cuy), existe un mercado insatisfecho tanto local, regional y nacional que es parte de la demanda objetivo, la asociación busca aprovechar una oportunidad de mercado en el mercado regional, en vista que la demanda regional puede absorber toda la producción de del cuy, tomando específicamente al mercado Ayacuchano.</text:span></text:p>
            <text:list text:style-name="WWNum7">
              <text:list-item>
                <text:p text:style-name="P62" loext:marker-style-name="T33"><text:span text:style-name="T33">Existe capacidad de organización y gestión de la asociación con experiencia en la crianza de cuy en sistemas de crianza con pozas.</text:span><text:span text:style-name="T33"/></text:p>
              </text:list-item>
              <text:list-item>
                <text:p text:style-name="P92" loext:marker-style-name="T33"><text:span text:style-name="T33">Existe la cantidad suficiente de materias primas e insumos dentro del ámbito de Pamanga, lo que garantizaría cumplir con los niveles de producción.</text:span><text:span text:style-name="T33"/></text:p>
              </text:list-item>
              <text:list-item>
                <text:p text:style-name="P92" loext:marker-style-name="T33"><text:span text:style-name="T33">La asociación cuenta con una cohesión social entre los miembros de la Asociación, incluyendo la participación integral de familias y grupos vulnerables como mujeres, ancianos, jóvenes y personas con discapacidad.</text:span><text:span text:style-name="T33"/></text:p>
              </text:list-item>
              <text:list-item>
                <text:p text:style-name="P92" loext:marker-style-name="T33"><text:span text:style-name="T33">Aumento de ingreso a la canasta familiar en comparación a la situación actual, posibilitará mayor rentabilidad; de lograrse este propósito, se deduce que el beneficio económico será favorable para los socios del AEO, los proveedores de insumos de sanidad, personas involucradas en el manejo y crianza de cuyes.</text:span><text:span text:style-name="T33"/></text:p>
              </text:list-item>
              <text:list-item>
                <text:p text:style-name="P92" loext:marker-style-name="T33"><text:span text:style-name="T33">Asimismo, la propuesta productiva no ha sido financiada por ninguna otra entidad, por lo que es una posibilidad abierta para concursar en el PROCOMPITE.</text:span><text:span text:style-name="T33"/></text:p>
              </text:list-item>
              <text:list-item>
                <text:p text:style-name="P92" loext:marker-style-name="T33"><text:span text:style-name="T33">La capacidad de organización de la Asociación es fundamental, ya que sus integrantes se dedican a la crianza de cuyes y conocen el negocio de cuy.</text:span><text:span text:style-name="T33"/></text:p>
              </text:list-item>
              <text:list-item>
                <text:p text:style-name="P92" loext:marker-style-name="T33"><text:span text:style-name="T33">Oportunidad para esta actividad productiva que contempla el marco de normatividad del PROCOMPITE que tiene por objeto mejorar la competitividad de la cadena productiva mediante transferencia de equipos, infraestructura, insumos en beneficios de los agentes económicos organizados, y lo más importante donde la inversión privada es insuficiente.</text:span><text:span text:style-name="T33"/></text:p>
              </text:list-item>
            </text:list>
            <text:p text:style-name="P104" loext:marker-style-name="T15"><text:span text:style-name="T15">Se justifica la implementación de la presente propuesta productiva por lo siguiente:</text:span><text:span text:style-name="T15"/></text:p>
            <text:p text:style-name="P104" loext:marker-style-name="T33"><text:span text:style-name="T15">Tecnológico</text:span><text:span text:style-name="T33">: con la adopción de nuevas tecnologías y optimización de las mismas se garantiza la sostenibilidad de la presente propuesta productiva.</text:span></text:p>
            <text:p text:style-name="P104" loext:marker-style-name="T33"><text:span text:style-name="T15">Económico</text:span><text:span text:style-name="T33">: los ingresos económicos de las familias se incrementarán, de acuerdo al crecimiento de población y animales a comercializar</text:span></text:p>
            <text:p text:style-name="P104" loext:marker-style-name="T33"><text:span text:style-name="T33">Existe una demanda insatisfecha de carne de cuy en los mercados potenciales, según el análisis de mercado realizado.</text:span><text:span text:style-name="T33"/></text:p>
            <text:p text:style-name="P104" loext:marker-style-name="T33"><text:span text:style-name="T15">Social</text:span><text:span text:style-name="T33">: se propicia la seguridad alimentaria de la población y mejora de la calidad de vida.</text:span></text:p>
            <text:p text:style-name="P75" loext:marker-style-name="T20"/>
          </table:table-cell>
        </table:table-row>
        <table:table-row table:style-name="Tabla4.2">
          <table:covered-table-cell table:style-name="Tabla4.A2"/>
        </table:table-row>
      </table:table>
      <text:p text:style-name="P88" loext:marker-style-name="T2"/>
      <text:p text:style-name="P88" loext:marker-style-name="T2"/>
      <text:list xml:id="list23957639387563" text:continue-list="list23958325103887" text:style-name="WWNum5">
        <text:list-item>
          <text:list>
            <text:list-item>
              <text:p text:style-name="P60" loext:marker-style-name="T3"><text:span text:style-name="T3">Descripción de la propuesta: Nuestra propuesta consiste específicamente en:</text:span><text:span text:style-name="T3"/></text:p>
            </text:list-item>
          </text:list>
        </text:list-item>
      </text:list>
      <table:table table:name="Tabla5" table:style-name="Tabla5">
        <table:table-column table:style-name="Tabla5.A"/>
        <table:table-row table:style-name="Tabla5.1">
          <table:table-cell table:style-name="Tabla5.A1" table:number-rows-spanned="2" office:value-type="string">
            <text:p text:style-name="P104" loext:marker-style-name="T33"><text:span text:style-name="T33">El negocio que desea mejorar la Asociación de Productores Agropecuarios Pamparque, tiene como actividad principal la producción y comercialización de cuyes, debido a la creciente demanda de este producto a nivel local, regional, nacional e internacional.</text:span></text:p>
            <text:p text:style-name="P104" loext:marker-style-name="T33"><text:span text:style-name="T33">La propuesta productiva está dirigido a mejorar la producción y comercialización del cuy; para lo cual se propone las siguientes líneas de intervención:</text:span><text:span text:style-name="T33"/></text:p>
            <text:list text:style-name="WWNum8">
              <text:list-item>
                <text:p text:style-name="P63" loext:marker-style-name="T33"><text:span text:style-name="T33">Instalación y Ampliación de la cobertura forrajera, con la siembra de pastos con variedades mejoradas de alfalfa e instalación de sistema de riego tecnificado por aspersión.</text:span><text:span text:style-name="T33"/></text:p>
              </text:list-item>
              <text:list-item>
                <text:p text:style-name="P63" loext:marker-style-name="T33"><text:span text:style-name="T33">Construcción de 8 galpones para los cuyes para la ampliación de la cantidad de cuyes. Para lo cual el GRA dotará de materiales para la construcción del galpón.</text:span><text:span text:style-name="T33"/></text:p>
              </text:list-item>
              <text:list-item>
                <text:p text:style-name="P63" loext:marker-style-name="T33"><text:span text:style-name="T33">Adquisición y entrega de reproductores mejorados de cuyes, en una cantidad de 85 reproductores hembras y 15 reproductores machos por parte del AEO.</text:span><text:span text:style-name="T33"/></text:p>
              </text:list-item>
              <text:list-item>
                <text:p text:style-name="P63" loext:marker-style-name="T33"><text:span text:style-name="T33">Capacitación de socios de AEO. <text:s/>Se tiene programado el fortalecimiento de capacidades de los beneficiarios con los siguientes temas: manejo de pastos, manejo y reproducción de cuyes, sanidad de cuyes y capacitaciones en organización, comercialización y mercadeo.</text:span><text:span text:style-name="T33"/></text:p>
              </text:list-item>
            </text:list>
            <text:p text:style-name="P77" loext:marker-style-name="T33"/>
            <text:p text:style-name="P104" loext:marker-style-name="T6"><text:span text:style-name="T5">Con respecto a la producción</text:span><text:span text:style-name="T5"/></text:p>
            <text:p text:style-name="P104" loext:marker-style-name="T6"><text:span text:style-name="T6">La propuesta contempla la mejora del plantel, con la incorporación de reproductores mejoradas con raza Perú. La adquisición de reproductores se realizará de centros reconocidos y autorizados como INIA, entre otras.</text:span><text:span text:style-name="T6"/></text:p>
            <text:p text:style-name="P104" loext:marker-style-name="T6"><text:span text:style-name="T6">En la propuesta se mejoramiento de la construcción de un galpón con pozas con divisiones de madera y malla metálica, la cual permite un mejor desarrollo y crecimiento del animal, además el manejo de la higiene y sanidad se realizan con mayor eficiencia. Además, se propone la instalación de pastos para mejorar y ampliar la cobertura y para un mejor rendimiento se realizará bajo el sistema de riego tecnificado por aspersión.</text:span></text:p>
            <text:p text:style-name="P104" loext:marker-style-name="T6"><text:span text:style-name="T6">Con la adquisición y entrega de 100 reproductores mejoradas de parte del AEO, se tiene proyectado para el primer año, lo siguiente (3,186 cuyes en el primer año de operación) y luego irá incrementándose cada año, hasta llegar al 5 año posterior hasta completar su capacidad producción de 11,444 reproductoras.</text:span><text:span text:style-name="T6"/></text:p>
            <text:p text:style-name="P104" loext:marker-style-name="T6"><text:span text:style-name="T6">Las zonas de producción de cuyes están ubicadas en áreas de comunidad de Pamparque, del Distrito de Puquio. Así mismo las zonas de comercialización a nivel distrital, provincial y regional; Los cuyes para ventas serán bajo estricto control de calidad y serán comercializados en el mercado Puquio.</text:span><text:span text:style-name="T6"/></text:p>
            <text:p text:style-name="P113" loext:marker-style-name="T35"/>
          </table:table-cell>
        </table:table-row>
        <table:table-row table:style-name="Tabla5.2">
          <table:covered-table-cell table:style-name="Tabla5.A2"/>
        </table:table-row>
      </table:table>
      <text:p text:style-name="P79" loext:marker-style-name="T36"/>
      <text:list text:continue-list="list23957639387563" text:style-name="WWNum5">
        <text:list-item>
          <text:list>
            <text:list-item>
              <text:p text:style-name="P60" loext:marker-style-name="T3"><text:span text:style-name="T3">Clasificador del gasto: la ubicación de la propuesta productiva en la cadena programática: </text:span><text:span text:style-name="T3"/></text:p>
            </text:list-item>
          </text:list>
        </text:list-item>
      </text:list>
      <table:table table:name="Tabla6" table:style-name="Tabla6">
        <table:table-column table:style-name="Tabla6.A"/>
        <table:table-column table:style-name="Tabla6.B"/>
        <table:table-row table:style-name="Tabla6.1">
          <table:table-cell table:style-name="Tabla6.A1" office:value-type="string">
            <text:p text:style-name="P94" loext:marker-style-name="T35"><text:span text:style-name="T35">Función</text:span><text:span text:style-name="T35"/></text:p>
          </table:table-cell>
          <table:table-cell table:style-name="Tabla6.A1" office:value-type="string">
            <text:p text:style-name="P90" loext:marker-style-name="T41"><text:span text:style-name="T41">Pecuario</text:span><text:span text:style-name="T41"/></text:p>
          </table:table-cell>
        </table:table-row>
        <table:table-row table:style-name="Tabla6.1">
          <table:table-cell table:style-name="Tabla6.A1" office:value-type="string">
            <text:p text:style-name="P94" loext:marker-style-name="T35"><text:span text:style-name="T35">División</text:span><text:span text:style-name="T35"/></text:p>
          </table:table-cell>
          <table:table-cell table:style-name="Tabla6.A1" office:value-type="string">
            <text:p text:style-name="P90" loext:marker-style-name="T41"><text:span text:style-name="T41">Animales Menores</text:span><text:span text:style-name="T41"/></text:p>
          </table:table-cell>
        </table:table-row>
        <table:table-row table:style-name="Tabla6.1">
          <table:table-cell table:style-name="Tabla6.A1" office:value-type="string">
            <text:p text:style-name="P94" loext:marker-style-name="T35"><text:span text:style-name="T35">Grupo</text:span><text:span text:style-name="T35"/></text:p>
          </table:table-cell>
          <table:table-cell table:style-name="Tabla6.A1" office:value-type="string">
            <text:p text:style-name="P90" loext:marker-style-name="T41"><text:span text:style-name="T41">Producción y comercialización de cuyes</text:span><text:span text:style-name="T41"/></text:p>
          </table:table-cell>
        </table:table-row>
      </table:table>
      <text:p text:style-name="P74" loext:marker-style-name="T3"/>
      <text:p text:style-name="P74" loext:marker-style-name="T3"/>
      <text:p text:style-name="P74" loext:marker-style-name="T3"/>
      <text:p text:style-name="P74" loext:marker-style-name="T3"/>
      <text:list xml:id="list23958558369129" text:continue-numbering="true" text:style-name="WWNum5">
        <text:list-item>
          <text:list>
            <text:list-item>
              <text:p text:style-name="P60" loext:marker-style-name="T3"><text:span text:style-name="T3">Objetivos y descripción de la propuesta productiva</text:span><text:span text:style-name="T3"/></text:p>
            </text:list-item>
          </text:list>
        </text:list-item>
      </text:list>
      <text:list text:style-name="WWNum3">
        <text:list-item>
          <text:list>
            <text:list-item>
              <text:list>
                <text:list-item>
                  <text:p text:style-name="P68" loext:marker-style-name="T19"><text:span text:style-name="T19"><text:s/>Misión:</text:span><text:span text:style-name="T19"/></text:p>
                </text:list-item>
              </text:list>
            </text:list-item>
          </text:list>
        </text:list-item>
      </text:list>
      <table:table table:name="Tabla7" table:style-name="Tabla7">
        <table:table-column table:style-name="Tabla7.A"/>
        <table:table-row table:style-name="Tabla7.1">
          <table:table-cell table:style-name="Tabla7.A1" office:value-type="string">
            <text:p text:style-name="P69" loext:marker-style-name="T19"><text:span text:style-name="T19">Somos una de las mejores organizaciones productora de cuy, que busca crecer y consolidarse en el mercado actual, nuestra asociación tiene el compromiso de enfrentar nuevos retos para mejorar nuestra calidad de producto, elevar los niveles de producción, generar productos con valor agregado, comercializar a nuevos mercados y generar puestos de trabajo</text:span><text:span text:style-name="T19"/></text:p>
          </table:table-cell>
        </table:table-row>
      </table:table>
      <text:p text:style-name="P72" loext:marker-style-name="T19"/>
      <text:list text:continue-numbering="true" text:style-name="WWNum3">
        <text:list-item>
          <text:list>
            <text:list-item>
              <text:list>
                <text:list-item>
                  <text:p text:style-name="P68" loext:marker-style-name="T19"><text:span text:style-name="T19">Visión </text:span><text:span text:style-name="T19"/></text:p>
                </text:list-item>
              </text:list>
            </text:list-item>
          </text:list>
        </text:list-item>
      </text:list>
      <table:table table:name="Tabla8" table:style-name="Tabla8">
        <table:table-column table:style-name="Tabla8.A"/>
        <table:table-row table:style-name="Tabla8.1">
          <table:table-cell table:style-name="Tabla8.A1" office:value-type="string">
            <text:p text:style-name="P90" loext:marker-style-name="T19"><text:span text:style-name="T19">Al 2025 la Asociación de Productores Agropecuarios Pamparque será una organización empresarial competitiva e innovadora que cumpla con los estándares de calidad para ser reconocidos, como la mejor institución productora de cuyes a nivel local y regional; con capacidad de competir en los mercados competitivos y con responsabilidad</text:span><text:span text:style-name="T19"/></text:p>
            <text:p text:style-name="P69" loext:marker-style-name="T19"><text:span text:style-name="T19">ambiental.</text:span><text:span text:style-name="T19"/></text:p>
          </table:table-cell>
        </table:table-row>
      </table:table>
      <text:list text:continue-numbering="true" text:style-name="WWNum3">
        <text:list-item>
          <text:list>
            <text:list-item>
              <text:list>
                <text:list-item>
                  <text:p text:style-name="P68" loext:marker-style-name="T19"><text:soft-page-break/><text:span text:style-name="T19">Objetivos (deben ser medibles y/o cuantificables)</text:span><text:span text:style-name="T19"/></text:p>
                </text:list-item>
              </text:list>
            </text:list-item>
          </text:list>
        </text:list-item>
      </text:list>
      <table:table table:name="Tabla9" table:style-name="Tabla9">
        <table:table-column table:style-name="Tabla9.A"/>
        <table:table-row table:style-name="Tabla9.1">
          <table:table-cell table:style-name="Tabla9.A1" office:value-type="string">
            <text:p text:style-name="P93" loext:marker-style-name="T33"><text:span text:style-name="T33"><text:s/>1. Incrementar la población de reproductores en durante el primer año de 771 a 3,186 mediante la adquisición de reproductores y la selección de reproductores a través de la asistencia técnica.</text:span><text:span text:style-name="T33"/></text:p>
            <text:p text:style-name="P93" loext:marker-style-name="T33"><text:span text:style-name="T33">2. Producir cuyes con pesos de 0.90 Kg -1.Kg/cuy en pie con tamaño uniforme, forma paralelepípedo, libre de enfermedades y daños a través de la aplicación de la tecnología moderna y adecuada en la producción de cuyes, lo que permitirá incrementar los ingresos económicos para los socios de la asociación.</text:span><text:span text:style-name="T33"/></text:p>
            <text:p text:style-name="P93" loext:marker-style-name="T33"><text:span text:style-name="T33">3. Cubrir el 11.74 % de la demanda insatisfecha durante el primer año (2021) de gestionado el Plan de Negocio y el 43.22 % al quinto año (2025) gestionado en Plan de Negocios</text:span><text:span text:style-name="T33"/></text:p>
            <text:p text:style-name="P93" loext:marker-style-name="T33"><text:span text:style-name="T33">4. Incrementar la comercialización de cuyes parrilleros de tipo I de 771 unidades/año (año 0) a 3,186 unidades de cuyes durante el primer año y a 11,144 al tercer año gestionado el plan de negocios</text:span><text:span text:style-name="T33"/></text:p>
            <text:p text:style-name="P114" loext:marker-style-name="T33"/>
          </table:table-cell>
        </table:table-row>
      </table:table>
      <text:p text:style-name="P74" loext:marker-style-name="T3"/>
      <text:list text:continue-list="list23958558369129" text:style-name="WWNum5">
        <text:list-item>
          <text:list>
            <text:list-item>
              <text:p text:style-name="P60" loext:marker-style-name="T3"><text:span text:style-name="T3">UBICACIÓN DE LA PROPUESTA PRODUCTIVA: La propuesta productiva interviene en las siguientes actividades:</text:span><text:span text:style-name="T3"/></text:p>
            </text:list-item>
          </text:list>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0" loext:marker-style-name="T21"/>
            <text:p text:style-name="P94" loext:marker-style-name="T21"><text:span text:style-name="T21">Ubicación de la cadena productiva</text:span><text:span text:style-name="T21"/></text:p>
          </table:table-cell>
          <table:table-cell table:style-name="Tabla10.A1" office:value-type="string">
            <text:p text:style-name="P94" loext:marker-style-name="T21"><text:span text:style-name="T21">Marca con una aspa</text:span><text:span text:style-name="T21"/></text:p>
          </table:table-cell>
          <table:table-cell table:style-name="Tabla10.A1" office:value-type="string">
            <text:p text:style-name="P94" loext:marker-style-name="T21"><text:span text:style-name="T21">Describir brevemente</text:span><text:span text:style-name="T21"/></text:p>
          </table:table-cell>
        </table:table-row>
        <table:table-row table:style-name="Tabla10.1">
          <table:table-cell table:style-name="Tabla10.A1" office:value-type="string">
            <text:p text:style-name="P90" loext:marker-style-name="T20"><text:span text:style-name="T20">Producción</text:span><text:span text:style-name="T20"/></text:p>
          </table:table-cell>
          <table:table-cell table:style-name="Tabla10.A1" office:value-type="string">
            <text:p text:style-name="P90" loext:marker-style-name="T20"><text:span text:style-name="T20">  <text:s text:c="13"/>X</text:span><text:span text:style-name="T20"/></text:p>
          </table:table-cell>
          <table:table-cell table:style-name="Tabla10.A1" office:value-type="string">
            <text:p text:style-name="P91" loext:marker-style-name="T35"><text:span text:style-name="T35">Consiste en la crianza de cuyes de la línea Perú, Andina (Perú como reproductores por su precocidad y la Andina como reproductoras por su prolificidad) con la finalidad de obtener productos (cuyes parrilleros) de calidad y alta productividad por galpón.</text:span><text:span text:style-name="T35"/></text:p>
            <text:p text:style-name="P91" loext:marker-style-name="T35"><text:span text:style-name="T35">El proceso productivo se desarrolla dentro de los galpones iniciándose en: adquisición de reproductores, empadre, preñez, parto, lactancia, destete, recría y saca. Dentro del proceso de manejo se seleccionan <text:s text:c="2"/>los mejores cuyes destetados para futuros reproductores. <text:s text:c="2"/>La alimentación de los cuyes es a base de alfalfa y concentrado a fin de obtener un producto de calidad y a menor tiempo. Esta actividad lo realizan cada uno de los <text:s text:c="2"/>por lo que existe la dificultad de hacer crianza rentable</text:span><text:span text:style-name="T35"/></text:p>
          </table:table-cell>
        </table:table-row>
        <table:table-row table:style-name="Tabla10.1">
          <table:table-cell table:style-name="Tabla10.A1" office:value-type="string">
            <text:p text:style-name="P90" loext:marker-style-name="T20"><text:span text:style-name="T20">Post-producción</text:span><text:span text:style-name="T20"/></text:p>
          </table:table-cell>
          <table:table-cell table:style-name="Tabla10.A1" office:value-type="string">
            <text:p text:style-name="P90" loext:marker-style-name="T20"><text:span text:style-name="T20"/></text:p>
          </table:table-cell>
          <table:table-cell table:style-name="Tabla10.A1" office:value-type="string">
            <text:p text:style-name="P99" loext:marker-style-name="T20"/>
          </table:table-cell>
        </table:table-row>
        <table:table-row table:style-name="Tabla10.1">
          <table:table-cell table:style-name="Tabla10.A1" office:value-type="string">
            <text:p text:style-name="P90" loext:marker-style-name="T20"><text:span text:style-name="T20">Transformación</text:span><text:span text:style-name="T20"/></text:p>
          </table:table-cell>
          <table:table-cell table:style-name="Tabla10.A1" office:value-type="string">
            <text:p text:style-name="P90" loext:marker-style-name="T20"><text:span text:style-name="T20"/></text:p>
          </table:table-cell>
          <table:table-cell table:style-name="Tabla10.A1" office:value-type="string">
            <text:p text:style-name="P94" loext:marker-style-name="T20"><text:span text:style-name="T20"/></text:p>
          </table:table-cell>
        </table:table-row>
        <table:table-row table:style-name="Tabla10.1">
          <table:table-cell table:style-name="Tabla10.A1" office:value-type="string">
            <text:p text:style-name="P90" loext:marker-style-name="T20"><text:span text:style-name="T20">Comercialización</text:span><text:span text:style-name="T20"/></text:p>
          </table:table-cell>
          <table:table-cell table:style-name="Tabla10.A1" office:value-type="string">
            <text:p text:style-name="P90" loext:marker-style-name="T20"><text:span text:style-name="T20">  <text:s text:c="14"/>X</text:span><text:span text:style-name="T20"/></text:p>
          </table:table-cell>
          <table:table-cell table:style-name="Tabla10.A1" office:value-type="string">
            <text:p text:style-name="P91" loext:marker-style-name="T20"><text:span text:style-name="T35">Una vez obtenido el producto (cuy), éste es y será comercializado en el mercado objetivo regional <text:s text:c="2"/>(Recreos del Distrito de <text:s/>puquio), mercado nacional( Restaurad peña turístico Pocho- Lima), Antes de la saca se verificara que el producto tenga un peso entre 0.9 kg a 1.0 kg, libre <text:s/>de enfermedades, ectoparásitos, y daño físico alguno.</text:span><text:span text:style-name="T20"/></text:p>
          </table:table-cell>
        </table:table-row>
      </table:table>
      <text:p text:style-name="P80" loext:marker-style-name="T42"/>
      <text:list text:continue-numbering="true" text:style-name="WWNum5">
        <text:list-item>
          <text:list>
            <text:list-item>
              <text:p text:style-name="P60" loext:marker-style-name="T3"><text:span text:style-name="T3">FUNDAMENTAR QUE LA PROPUESTA PRODUCTIVA NO ES DUPLICACIÓN DE OTRA.</text:span><text:span text:style-name="T3"/></text:p>
            </text:list-item>
          </text:list>
        </text:list-item>
      </text:list>
      <table:table table:name="Tabla11" table:style-name="Tabla11">
        <table:table-column table:style-name="Tabla11.A"/>
        <table:table-row table:style-name="Tabla11.1">
          <table:table-cell table:style-name="Tabla11.A1" office:value-type="string">
            <text:p text:style-name="P91" loext:marker-style-name="T41"><text:span text:style-name="T41">La propuesta productiva es duplicación de otra, esto porque la asociación PAMPARQUE se presenta recientemente en este tipo de concursos no reembolsables</text:span><text:span text:style-name="T41"/></text:p>
          </table:table-cell>
        </table:table-row>
      </table:table>
      <text:p text:style-name="P71" loext:marker-style-name="T19"/>
      <text:list text:continue-numbering="true" text:style-name="WWNum5">
        <text:list-item>
          <text:p text:style-name="P58" loext:marker-style-name="T13"><text:span text:style-name="T13">EL PRODUCTO Y LA CADENA PRODUCTIVA</text:span><text:span text:style-name="T13"/></text:p>
        </text:list-item>
      </text:list>
      <text:p text:style-name="P73" loext:marker-style-name="T19"/>
      <text:list text:continue-numbering="true" text:style-name="WWNum5">
        <text:list-item>
          <text:list>
            <text:list-item>
              <text:p text:style-name="P59" loext:marker-style-name="T13"><text:span text:style-name="T13">EL PRODUCTO DE LA PROPUESTA PRODUCTIVA: descripción del producto a vender, incluye imagen</text:span><text:span text:style-name="T13"/></text:p>
            </text:list-item>
          </text:list>
        </text:list-item>
      </text:list>
      <table:table table:name="Tabla12" table:style-name="Tabla12">
        <table:table-column table:style-name="Tabla12.A"/>
        <table:table-row table:style-name="Tabla12.1">
          <table:table-cell table:style-name="Tabla12.A1" office:value-type="string">
            <text:p text:style-name="P90" loext:marker-style-name="T41"><text:span text:style-name="T41">Producto principal: Cuy parrillero tipo I en pie</text:span><text:span text:style-name="T41"/></text:p>
            <text:p text:style-name="P91" loext:marker-style-name="T41"><text:span text:style-name="T41">El producto principal es el Cuy parrillero en pie tipo I con un peso que varía entre 0.90 Kg – 1.0 Kg, es necesario realizar el control del peso al momento de la saca. Los productores cumplirán con los estándares mínimos establecidos por el comprador (recreos turísticos de Puquio y Lima). Siendo el producto a ofrecer a ellos de calidad (cuyes con pesos homogéneos y tiernos al mismo tiempo de conformación <text:s text:c="3"/>física <text:s text:c="3"/>semejante <text:s text:c="3"/>a <text:s text:c="3"/>un paralelepípedo</text:span><text:span text:style-name="T41"/></text:p>
            <text:p text:style-name="P117" loext:marker-style-name="T41"><draw:frame draw:style-name="fr5" draw:name="Imagen 18" text:anchor-type="char" svg:x="9.255cm" svg:y="-3.064cm" svg:width="5.542cm" svg:height="4.544cm" draw:z-index="30"><draw:image xlink:href="Pictures/10000001000000E9000000BF1267B552.png" xlink:type="simple" xlink:show="embed" xlink:actuate="onLoad" draw:mime-type="image/png"/></draw:frame></text:p>
          </table:table-cell>
        </table:table-row>
      </table:table>
      <text:p text:style-name="P118" loext:marker-style-name="T41"/>
      <text:list text:continue-numbering="true" text:style-name="WWNum5">
        <text:list-item>
          <text:list>
            <text:list-item>
              <text:p text:style-name="P59" loext:marker-style-name="T13"><text:span text:style-name="T13">DIAGNOSTICO DE LA SITUACION ACTUAL: describir como está el negocio, en qué situación se encuentra: </text:span><text:span text:style-name="T13"/></text:p>
            </text:list-item>
          </text:list>
        </text:list-item>
      </text:list>
      <table:table table:name="Tabla13" table:style-name="Tabla13">
        <table:table-column table:style-name="Tabla13.A"/>
        <table:table-row table:style-name="Tabla13.1">
          <table:table-cell table:style-name="Tabla13.A1" table:number-rows-spanned="2" office:value-type="string">
            <text:p text:style-name="P91" loext:marker-style-name="T32"><text:span text:style-name="T14">Proveedores</text:span><text:span text:style-name="T32">: Los proveedores de insumos forrajera para los cuyes son los mismos criadores. Los proveedores de semovientes se encuentran en Huamanga, Huancayo y estaciones experimentales del INIA- Canaán</text:span></text:p>
            <text:p text:style-name="P91" loext:marker-style-name="T32"><text:span text:style-name="T14">Plantel de reproductores</text:span><text:span text:style-name="T32">: Los socios del AEO “Asociación de Productores Agropecuarios PA,MPARQUE, tiene cuyes reproductores de línea Perú, inti y andina están degeneradas por falta de manejo genético.</text:span></text:p>
            <text:p text:style-name="P91" loext:marker-style-name="T32"><text:span text:style-name="T14">Manejo</text:span><text:span text:style-name="T32">: El manejo de los cuyes se realiza en pozas, separando los gazapos a los 21 días de edad, el empadre es continuo. El manejo de los destetados es por lotes de hembras y machos y la crianza de realiza en el galpón de cuyes ubicado en la Comunidad de Pamparque- Puquio.</text:span></text:p>
            <text:p text:style-name="P91" loext:marker-style-name="T32"><text:span text:style-name="T14">Alimentación</text:span><text:span text:style-name="T32">: La AEO cuentan con parcelas de pastos instalados, contando con promedio 0.18 Has por socio de pastos instalados que tienen hasta el sexto corte por año. También utilizan otros sub productos de cosechas de maíz (panca), la paja de trigo o cebada (uso como cama y alimento). El concentrado o alimento industrial compran en la ciudad de Puquio donde existen distribuidores exclusivos en este rublo de alimentos</text:span></text:p>
            <text:p text:style-name="P91" loext:marker-style-name="T32"><text:span text:style-name="T14">Control Sanitario</text:span><text:span text:style-name="T32">: La prevención para el ataque de parásitos internos y externos, no es programada se realiza cuando la plaga o enfermedad está presente en el galpón o lugar donde crían, la limpieza de los galpones se realiza Inter diaria, con respecto a normas de Bio seguridad, se tiene implementado maniluvios y pediluvios a la entrada del galpón.</text:span></text:p>
            <text:p text:style-name="P91" loext:marker-style-name="T32"><text:span text:style-name="T14">Saca</text:span><text:span text:style-name="T32">: La saca se realiza generalmente cuando la familia necesita tener liquidez económica, o cuando el consumidor llega a comprarles el producto, también realizan saca, cuando el cuy ha alcanzado su edad adulta o pesa más de un kilo</text:span></text:p>
            <text:p text:style-name="P91" loext:marker-style-name="T32"><text:span text:style-name="T14">Comercialización</text:span><text:span text:style-name="T32">: El producto en su mayoría se vende en el galpón de crianza, allí acuden los comerciantes, intermediarios, y los compradores para los restaurantes. Cuando es traslado a centros de venta lo realizan en jabas</text:span></text:p>
            <text:p text:style-name="P91" loext:marker-style-name="T32"><text:span text:style-name="T14">Cantidades producidas</text:span><text:span text:style-name="T32">: La AEO en la actualidad producen la cantidad de 244 cuyes hembras, 55 machos, 472 recrías, (Fuente: Diagnostico de Campo. 2020).</text:span></text:p>
            <text:p text:style-name="P91" loext:marker-style-name="T32"><text:span text:style-name="T32">El distrito de Puquio, se caracteriza por presentar una geografía accidentada, sin embargo, se tiene zonas apropiadas con gran potencial para desarrollar la crianza de cuyes, cuenta con abundante recurso hídrico, pastos cultivados que permiten abastecer suficientemente la crianza de cuyes. El obstáculo principal reside en la limitada tecnificación, asistencia técnica y acceso al crédito.</text:span><text:span text:style-name="T32"/></text:p>
            <text:p text:style-name="P98" loext:marker-style-name="T20"/>
          </table:table-cell>
        </table:table-row>
        <table:table-row table:style-name="Tabla13.1">
          <table:covered-table-cell table:style-name="Tabla13.A1"/>
        </table:table-row>
      </table:table>
      <text:p text:style-name="P118" loext:marker-style-name="T41"><text:soft-page-break/></text:p>
      <text:list text:continue-numbering="true" text:style-name="WWNum5">
        <text:list-item>
          <text:list>
            <text:list-item>
              <text:p text:style-name="P59" loext:marker-style-name="T13"><text:span text:style-name="T13">LA CADENA PRODUCTIVA:</text:span><text:span text:style-name="T13"/></text:p>
            </text:list-item>
          </text:list>
        </text:list-item>
      </text:list>
      <table:table table:name="Tabla14" table:style-name="Tabla14">
        <table:table-column table:style-name="Tabla14.A"/>
        <table:table-column table:style-name="Tabla14.B"/>
        <table:table-row table:style-name="Tabla14.1">
          <table:table-cell table:style-name="Tabla14.A1" office:value-type="string">
            <text:p text:style-name="P90" loext:marker-style-name="T41"><text:span text:style-name="T41">Producto</text:span><text:span text:style-name="T41"/></text:p>
          </table:table-cell>
          <table:table-cell table:style-name="Tabla14.A1" office:value-type="string">
            <text:p text:style-name="P90" loext:marker-style-name="T41"><text:span text:style-name="T41"><text:s/>Cuy parrillero</text:span></text:p>
          </table:table-cell>
        </table:table-row>
        <table:table-row table:style-name="Tabla14.2">
          <table:table-cell table:style-name="Tabla14.A1" office:value-type="string">
            <text:p text:style-name="P90" loext:marker-style-name="T41"><text:span text:style-name="T41">Sector</text:span><text:span text:style-name="T41"/></text:p>
          </table:table-cell>
          <table:table-cell table:style-name="Tabla14.A1" office:value-type="string">
            <text:p text:style-name="P90" loext:marker-style-name="T41"><text:span text:style-name="T41">pecuario</text:span></text:p>
          </table:table-cell>
        </table:table-row>
        <table:table-row table:style-name="Tabla14.1">
          <table:table-cell table:style-name="Tabla14.A1" office:value-type="string">
            <text:p text:style-name="P90" loext:marker-style-name="T41"><text:span text:style-name="T41">Cadena</text:span><text:span text:style-name="T41"/></text:p>
          </table:table-cell>
          <table:table-cell table:style-name="Tabla14.A1" office:value-type="string">
            <text:p text:style-name="P90" loext:marker-style-name="T41"><text:span text:style-name="T41">cuy</text:span><text:span text:style-name="T41"/></text:p>
          </table:table-cell>
        </table:table-row>
        <table:table-row table:style-name="Tabla14.2">
          <table:table-cell table:style-name="Tabla14.A1" office:value-type="string">
            <text:p text:style-name="P90" loext:marker-style-name="T41"><text:span text:style-name="T41">Eslabonamiento</text:span><text:span text:style-name="T41"/></text:p>
          </table:table-cell>
          <table:table-cell table:style-name="Tabla14.A1" office:value-type="string">
            <text:p text:style-name="P90" loext:marker-style-name="T41"><text:span text:style-name="T41">Producción y comercialización</text:span></text:p>
          </table:table-cell>
        </table:table-row>
      </table:table>
      <text:list text:continue-numbering="true" text:style-name="WWNum5">
        <text:list-item>
          <text:list>
            <text:list-item>
              <text:p text:style-name="P59" loext:marker-style-name="T13"><text:span text:style-name="T13">ALIANZAS ESTRATEGICAS Y OPORTUNIDADES DE NEGOCIO: La propuesta productiva a identificado alianzas estratégicas para la producción u oportunidades de negocios para la comercialización, probables o concretadas, instituciones u otras organizaciones.</text:span><text:span text:style-name="T13"/></text:p>
            </text:list-item>
          </text:list>
        </text:list-item>
      </text:list>
      <text:p text:style-name="P122" loext:marker-style-name="T13"/>
      <table:table table:name="Tabla15" table:style-name="Tabla15">
        <table:table-column table:style-name="Tabla15.A" table:number-columns-repeated="4"/>
        <table:table-row table:style-name="Tabla15.1">
          <table:table-cell table:style-name="Tabla15.A1" office:value-type="string">
            <text:p text:style-name="P1" loext:marker-style-name="T21"><text:span text:style-name="T21">Descripción de la alianza estratégica u oportunidad de negocio</text:span><text:span text:style-name="T21"/></text:p>
          </table:table-cell>
          <table:table-cell table:style-name="Tabla15.A1" office:value-type="string">
            <text:p text:style-name="P1" loext:marker-style-name="T21"><text:span text:style-name="T21">Finalidad</text:span><text:span text:style-name="T21"/></text:p>
          </table:table-cell>
          <table:table-cell table:style-name="Tabla15.A1" office:value-type="string">
            <text:p text:style-name="P1" loext:marker-style-name="T21"><text:span text:style-name="T21">Empresa u organización</text:span><text:span text:style-name="T21"/></text:p>
          </table:table-cell>
          <table:table-cell table:style-name="Tabla15.A1" office:value-type="string">
            <text:p text:style-name="P1" loext:marker-style-name="T21"><text:span text:style-name="T21">La alianza u oportunidad ¿Es probable o concreta*?</text:span><text:span text:style-name="T21"/></text:p>
          </table:table-cell>
        </table:table-row>
        <table:table-row table:style-name="Tabla15.1">
          <table:table-cell table:style-name="Tabla15.A2" office:value-type="string">
            <text:p text:style-name="P13" loext:marker-style-name="T7"><text:span text:style-name="T44">C</text:span><text:span text:style-name="T50">o</text:span><text:span text:style-name="T55">f</text:span><text:span text:style-name="T60">i</text:span><text:span text:style-name="T50">nanc</text:span><text:span text:style-name="T60">i</text:span><text:span text:style-name="T50">a</text:span><text:span text:style-name="T65">m</text:span><text:span text:style-name="T60">i</text:span><text:span text:style-name="T50">en</text:span><text:span text:style-name="T55">t</text:span><text:span text:style-name="T7">o </text:span><text:span text:style-name="T50">pa</text:span><text:span text:style-name="T55">r</text:span><text:span text:style-name="T7">a</text:span><text:span text:style-name="T44"> </text:span><text:span text:style-name="T60">l</text:span><text:span text:style-name="T7">a</text:span><text:span text:style-name="T44"> elaboración </text:span><text:span text:style-name="T7"><text:s/></text:span><text:span text:style-name="T50">de</text:span><text:span text:style-name="T7">l</text:span><text:span text:style-name="T68"> </text:span><text:span text:style-name="T65">P</text:span><text:span text:style-name="T60">l</text:span><text:span text:style-name="T50">a</text:span><text:span text:style-name="T7">n</text:span><text:span text:style-name="T44"> </text:span><text:span text:style-name="T50">d</text:span><text:span text:style-name="T7">e </text:span><text:span text:style-name="T44">N</text:span><text:span text:style-name="T50">e</text:span><text:span text:style-name="T71">g</text:span><text:span text:style-name="T50">oc</text:span><text:span text:style-name="T60">i</text:span><text:span text:style-name="T7">o</text:span></text:p>
          </table:table-cell>
          <table:table-cell table:style-name="Tabla15.B2" office:value-type="string">
            <text:p text:style-name="P40" loext:marker-style-name="T76"/>
            <text:p text:style-name="P14" loext:marker-style-name="T84"><text:span text:style-name="T46">A</text:span><text:span text:style-name="T52">s</text:span><text:span text:style-name="T62">i</text:span><text:span text:style-name="T52">gna</text:span><text:span text:style-name="T84">r</text:span><text:span text:style-name="T73"> </text:span><text:span text:style-name="T57">r</text:span><text:span text:style-name="T52">ecu</text:span><text:span text:style-name="T57">r</text:span><text:span text:style-name="T73">s</text:span><text:span text:style-name="T52">o</text:span><text:span text:style-name="T84">s </text:span><text:span text:style-name="T52">pa</text:span><text:span text:style-name="T57">r</text:span><text:span text:style-name="T84">a la consultoria</text:span></text:p>
          </table:table-cell>
          <table:table-cell table:style-name="Tabla15.C2" office:value-type="string">
            <text:p text:style-name="P41" loext:marker-style-name="T77"/>
            <text:p text:style-name="P43" loext:marker-style-name="T79"/>
            <text:p text:style-name="P6" loext:marker-style-name="T90"><text:span text:style-name="T87">M</text:span><text:span text:style-name="T59">.</text:span><text:span text:style-name="T49">D</text:span><text:span text:style-name="T90">.</text:span><text:span text:style-name="T75"> Lucanas Puquio</text:span></text:p>
          </table:table-cell>
          <table:table-cell table:style-name="Tabla15.D2" office:value-type="string">
            <text:p text:style-name="P42" loext:marker-style-name="T78"/>
            <text:p text:style-name="P44" loext:marker-style-name="T80"/>
            <text:p text:style-name="P7" loext:marker-style-name="T90"><text:span text:style-name="T49">Concreta</text:span><text:span text:style-name="T49"/></text:p>
          </table:table-cell>
        </table:table-row>
        <table:table-row table:style-name="Tabla15.1">
          <table:table-cell table:style-name="Tabla15.A3" office:value-type="string">
            <text:p text:style-name="P32" loext:marker-style-name="T91"/>
            <text:p text:style-name="P22" loext:marker-style-name="T85"><text:span text:style-name="T47"><text:s text:c="2"/>Extensionismo</text:span><text:span text:style-name="T47"/></text:p>
          </table:table-cell>
          <table:table-cell table:style-name="Tabla15.B3" office:value-type="string">
            <text:p text:style-name="P15" loext:marker-style-name="T8"><text:span text:style-name="T45">Asistencia técnica en manejo de pastos cultivados</text:span></text:p>
          </table:table-cell>
          <table:table-cell table:style-name="Tabla15.C3" office:value-type="string">
            <text:p text:style-name="P29" loext:marker-style-name="T47"/>
            <text:p text:style-name="P2" loext:marker-style-name="T47"><text:span text:style-name="T47">AGRORURAL Agencia Zonal Lucanas Puquio</text:span><text:span text:style-name="T47"/></text:p>
          </table:table-cell>
          <table:table-cell table:style-name="Tabla15.D3" office:value-type="string">
            <text:p text:style-name="P36" loext:marker-style-name="T93"/>
            <text:p text:style-name="P8" loext:marker-style-name="T85"><text:span text:style-name="T47">C</text:span><text:span text:style-name="T53">o</text:span><text:span text:style-name="T74">n</text:span><text:span text:style-name="T53">c</text:span><text:span text:style-name="T58">r</text:span><text:span text:style-name="T53">e</text:span><text:span text:style-name="T58">t</text:span><text:span text:style-name="T85">a</text:span></text:p>
          </table:table-cell>
        </table:table-row>
        <table:table-row table:style-name="Tabla15.1">
          <table:table-cell table:style-name="Tabla15.A4" office:value-type="string">
            <text:p text:style-name="P33" loext:marker-style-name="T91"/>
            <text:p text:style-name="P23" loext:marker-style-name="T85"><text:span text:style-name="T47">C</text:span><text:span text:style-name="T53">on</text:span><text:span text:style-name="T58">tr</text:span><text:span text:style-name="T53">o</text:span><text:span text:style-name="T85">l</text:span><text:span text:style-name="T69"> </text:span><text:span text:style-name="T53">d</text:span><text:span text:style-name="T85">e</text:span><text:span text:style-name="T47"> </text:span><text:span text:style-name="T63">l</text:span><text:span text:style-name="T85">a </text:span><text:span text:style-name="T53">san</text:span><text:span text:style-name="T63">i</text:span><text:span text:style-name="T53">da</text:span><text:span text:style-name="T85">d</text:span></text:p>
          </table:table-cell>
          <table:table-cell table:style-name="Tabla15.B4" office:value-type="string">
            <text:p text:style-name="P16" loext:marker-style-name="T8"><text:span text:style-name="T45">C</text:span><text:span text:style-name="T51">e</text:span><text:span text:style-name="T56">rt</text:span><text:span text:style-name="T61">i</text:span><text:span text:style-name="T95">f</text:span><text:span text:style-name="T61">i</text:span><text:span text:style-name="T51">cac</text:span><text:span text:style-name="T61">i</text:span><text:span text:style-name="T51">ó</text:span><text:span text:style-name="T8">n</text:span><text:span text:style-name="T45"> </text:span><text:span text:style-name="T51">d</text:span><text:span text:style-name="T8">e </text:span><text:span text:style-name="T51">p</text:span><text:span text:style-name="T56">r</text:span><text:span text:style-name="T51">od</text:span><text:span text:style-name="T72">u</text:span><text:span text:style-name="T51">c</text:span><text:span text:style-name="T56">t</text:span><text:span text:style-name="T51">o</text:span><text:span text:style-name="T8">s</text:span><text:span text:style-name="T88"> </text:span><text:span text:style-name="T51">d</text:span><text:span text:style-name="T8">e </text:span><text:span text:style-name="T51">ca</text:span><text:span text:style-name="T56">l</text:span><text:span text:style-name="T61">i</text:span><text:span text:style-name="T51">da</text:span><text:span text:style-name="T8">d</text:span></text:p>
          </table:table-cell>
          <table:table-cell table:style-name="Tabla15.C4" office:value-type="string">
            <text:p text:style-name="P39" loext:marker-style-name="T94"/>
            <text:p text:style-name="P9" loext:marker-style-name="T85"><text:span text:style-name="T47">Veterinaria San Martin <text:s/>De Porres</text:span><text:span text:style-name="T47"/></text:p>
          </table:table-cell>
          <table:table-cell table:style-name="Tabla15.D4" office:value-type="string">
            <text:p text:style-name="P37" loext:marker-style-name="T93"/>
            <text:p text:style-name="P7" loext:marker-style-name="T85"><text:span text:style-name="T47">Concreta</text:span><text:span text:style-name="T47"/></text:p>
          </table:table-cell>
        </table:table-row>
        <table:table-row table:style-name="Tabla15.1">
          <table:table-cell table:style-name="Tabla15.A5" office:value-type="string">
            <text:p text:style-name="P39" loext:marker-style-name="T94"/>
            <text:p text:style-name="P10" loext:marker-style-name="T85"><text:span text:style-name="T47">E</text:span><text:span text:style-name="T74">x</text:span><text:span text:style-name="T58">t</text:span><text:span text:style-name="T53">ens</text:span><text:span text:style-name="T63">i</text:span><text:span text:style-name="T53">on</text:span><text:span text:style-name="T63">i</text:span><text:span text:style-name="T53">s</text:span><text:span text:style-name="T67">m</text:span><text:span text:style-name="T85">o</text:span></text:p>
          </table:table-cell>
          <table:table-cell table:style-name="Tabla15.B5" office:value-type="string">
            <text:p text:style-name="P17" loext:marker-style-name="T8"><text:span text:style-name="T45">A</text:span><text:span text:style-name="T51">s</text:span><text:span text:style-name="T61">i</text:span><text:span text:style-name="T51">s</text:span><text:span text:style-name="T56">t</text:span><text:span text:style-name="T51">enc</text:span><text:span text:style-name="T61">i</text:span><text:span text:style-name="T8">a</text:span><text:span text:style-name="T45"> </text:span><text:span text:style-name="T56">t</text:span><text:span text:style-name="T51">écn</text:span><text:span text:style-name="T61">i</text:span><text:span text:style-name="T51">c</text:span><text:span text:style-name="T8">a </text:span><text:span text:style-name="T51">e</text:span><text:span text:style-name="T8">n</text:span><text:span text:style-name="T45"> </text:span><text:span text:style-name="T61">l</text:span><text:span text:style-name="T8">a</text:span><text:span text:style-name="T45"> </text:span><text:span text:style-name="T51">cr</text:span><text:span text:style-name="T61">i</text:span><text:span text:style-name="T51">an</text:span><text:span text:style-name="T72">z</text:span><text:span text:style-name="T8">a</text:span><text:span text:style-name="T45"> </text:span><text:span text:style-name="T51">d</text:span><text:span text:style-name="T8">e </text:span><text:span text:style-name="T51">cu</text:span><text:span text:style-name="T72">y</text:span><text:span text:style-name="T51">e</text:span><text:span text:style-name="T8">s</text:span></text:p>
          </table:table-cell>
          <table:table-cell table:style-name="Tabla15.C5" office:value-type="string">
            <text:p text:style-name="P33" loext:marker-style-name="T91"/>
            <text:p text:style-name="P2" loext:marker-style-name="T85"><text:span text:style-name="T47">A</text:span><text:span text:style-name="T53">g</text:span><text:span text:style-name="T74">e</text:span><text:span text:style-name="T53">nc</text:span><text:span text:style-name="T63">i</text:span><text:span text:style-name="T85">a</text:span><text:span text:style-name="T47"> A</text:span><text:span text:style-name="T53">g</text:span><text:span text:style-name="T58">r</text:span><text:span text:style-name="T53">a</text:span><text:span text:style-name="T58">r</text:span><text:span text:style-name="T63">i</text:span><text:span text:style-name="T85">a</text:span></text:p>
            <text:p text:style-name="P3" loext:marker-style-name="T85"><text:span text:style-name="T53">Lucanas Puquio</text:span><text:span text:style-name="T53"/></text:p>
          </table:table-cell>
          <table:table-cell table:style-name="Tabla15.D5" office:value-type="string">
            <text:p text:style-name="P37" loext:marker-style-name="T93"/>
            <text:p text:style-name="P7" loext:marker-style-name="T85"><text:span text:style-name="T47">Concreta</text:span><text:span text:style-name="T47"/></text:p>
          </table:table-cell>
        </table:table-row>
        <table:table-row table:style-name="Tabla15.1">
          <table:table-cell table:style-name="Tabla15.A6" office:value-type="string">
            <text:p text:style-name="P45" loext:marker-style-name="T81"/>
            <text:p text:style-name="P11" loext:marker-style-name="T90"><text:span text:style-name="T49">P</text:span><text:span text:style-name="T59">r</text:span><text:span text:style-name="T54">od</text:span><text:span text:style-name="T75">u</text:span><text:span text:style-name="T54">cc</text:span><text:span text:style-name="T64">i</text:span><text:span text:style-name="T54">ó</text:span><text:span text:style-name="T90">n</text:span></text:p>
          </table:table-cell>
          <table:table-cell table:style-name="Tabla15.B6" office:value-type="string">
            <text:p text:style-name="P24" loext:marker-style-name="T7"><text:span text:style-name="T44">P</text:span><text:span text:style-name="T55">r</text:span><text:span text:style-name="T50">od</text:span><text:span text:style-name="T71">u</text:span><text:span text:style-name="T50">cc</text:span><text:span text:style-name="T60">i</text:span><text:span text:style-name="T50">ó</text:span><text:span text:style-name="T7">n</text:span><text:span text:style-name="T44"> </text:span><text:span text:style-name="T50">d</text:span><text:span text:style-name="T7">e </text:span><text:span text:style-name="T50">cu</text:span><text:span text:style-name="T71">y</text:span><text:span text:style-name="T50">e</text:span><text:span text:style-name="T7">s</text:span><text:span text:style-name="T44"> </text:span><text:span text:style-name="T71">e</text:span><text:span text:style-name="T7">n</text:span><text:span text:style-name="T44"> </text:span><text:span text:style-name="T50">p</text:span><text:span text:style-name="T60">i</text:span><text:span text:style-name="T7">e</text:span></text:p>
          </table:table-cell>
          <table:table-cell table:style-name="Tabla15.C6" office:value-type="string">
            <text:p text:style-name="P4" loext:marker-style-name="T84"><text:span text:style-name="T46">A</text:span><text:span text:style-name="T52">s</text:span><text:span text:style-name="T73">o</text:span><text:span text:style-name="T52">c</text:span><text:span text:style-name="T62">i</text:span><text:span text:style-name="T52">ac</text:span><text:span text:style-name="T62">i</text:span><text:span text:style-name="T52">ó</text:span><text:span text:style-name="T84">n</text:span></text:p>
            <text:p text:style-name="P5" loext:marker-style-name="T84"><text:span text:style-name="T46">De Prod. Agrop. Pamparque</text:span><text:span text:style-name="T46"/></text:p>
          </table:table-cell>
          <table:table-cell table:style-name="Tabla15.D6" office:value-type="string">
            <text:p text:style-name="P46" loext:marker-style-name="T82"/>
            <text:p text:style-name="P8" loext:marker-style-name="T90"><text:span text:style-name="T49">C</text:span><text:span text:style-name="T54">o</text:span><text:span text:style-name="T75">n</text:span><text:span text:style-name="T54">c</text:span><text:span text:style-name="T59">r</text:span><text:span text:style-name="T54">e</text:span><text:span text:style-name="T59">t</text:span><text:span text:style-name="T90">a</text:span></text:p>
          </table:table-cell>
        </table:table-row>
        <table:table-row table:style-name="Tabla15.1">
          <table:table-cell table:style-name="Tabla15.A7" office:value-type="string">
            <text:p text:style-name="P40" loext:marker-style-name="T76"/>
            <text:p text:style-name="P20" loext:marker-style-name="T7"><text:span text:style-name="T44">C</text:span><text:span text:style-name="T50">o</text:span><text:span text:style-name="T55">f</text:span><text:span text:style-name="T60">i</text:span><text:span text:style-name="T50">nanc</text:span><text:span text:style-name="T60">i</text:span><text:span text:style-name="T50">a</text:span><text:span text:style-name="T65">m</text:span><text:span text:style-name="T60">i</text:span><text:span text:style-name="T50">en</text:span><text:span text:style-name="T55">t</text:span><text:span text:style-name="T7">o </text:span><text:span text:style-name="T50">pa</text:span><text:span text:style-name="T55">r</text:span><text:span text:style-name="T7">a</text:span><text:span text:style-name="T44"> </text:span><text:span text:style-name="T60">l</text:span><text:span text:style-name="T7">a</text:span><text:span text:style-name="T44"> </text:span><text:span text:style-name="T50">e</text:span><text:span text:style-name="T96">j</text:span><text:span text:style-name="T71">e</text:span><text:span text:style-name="T50">c</text:span><text:span text:style-name="T71">u</text:span><text:span text:style-name="T50">c</text:span><text:span text:style-name="T60">i</text:span><text:span text:style-name="T50">ó</text:span><text:span text:style-name="T7">n de plan de negocio</text:span></text:p>
          </table:table-cell>
          <table:table-cell table:style-name="Tabla15.B7" office:value-type="string">
            <text:p text:style-name="P25" loext:marker-style-name="T90"><text:span text:style-name="T49">A</text:span><text:span text:style-name="T54">s</text:span><text:span text:style-name="T64">i</text:span><text:span text:style-name="T54">gna</text:span><text:span text:style-name="T90">r</text:span><text:span text:style-name="T75"> </text:span><text:span text:style-name="T59">r</text:span><text:span text:style-name="T54">ecu</text:span><text:span text:style-name="T59">r</text:span><text:span text:style-name="T75">s</text:span><text:span text:style-name="T54">o</text:span><text:span text:style-name="T90">s </text:span><text:span text:style-name="T54">pa</text:span><text:span text:style-name="T59">r</text:span><text:span text:style-name="T90">a </text:span><text:span text:style-name="T49">PROCO</text:span><text:span text:style-name="T87">M</text:span><text:span text:style-name="T49">P</text:span><text:span text:style-name="T59">I</text:span><text:span text:style-name="T75">T</text:span><text:span text:style-name="T90">E</text:span></text:p>
          </table:table-cell>
          <table:table-cell table:style-name="Tabla15.C7" office:value-type="string">
            <text:p text:style-name="P26" loext:marker-style-name="T90"><text:span text:style-name="T49">G</text:span><text:span text:style-name="T54">ob</text:span><text:span text:style-name="T64">i</text:span><text:span text:style-name="T54">e</text:span><text:span text:style-name="T59">r</text:span><text:span text:style-name="T54">n</text:span><text:span text:style-name="T90">o </text:span><text:span text:style-name="T49">R</text:span><text:span text:style-name="T54">eg</text:span><text:span text:style-name="T64">i</text:span><text:span text:style-name="T54">ona</text:span><text:span text:style-name="T90">l</text:span><text:span text:style-name="T70"> </text:span><text:span text:style-name="T49">D</text:span><text:span text:style-name="T90">e </text:span><text:span text:style-name="T49">A</text:span><text:span text:style-name="T75">y</text:span><text:span text:style-name="T54">ac</text:span><text:span text:style-name="T75">u</text:span><text:span text:style-name="T54">ch</text:span><text:span text:style-name="T90">o</text:span></text:p>
          </table:table-cell>
          <table:table-cell table:style-name="Tabla15.D7" office:value-type="string">
            <text:p text:style-name="P47" loext:marker-style-name="T83"/>
            <text:p text:style-name="P12" loext:marker-style-name="T90"><text:span text:style-name="T49">C</text:span><text:span text:style-name="T54">o</text:span><text:span text:style-name="T75">n</text:span><text:span text:style-name="T54">c</text:span><text:span text:style-name="T59">r</text:span><text:span text:style-name="T54">e</text:span><text:span text:style-name="T59">t</text:span><text:span text:style-name="T90">a</text:span></text:p>
          </table:table-cell>
        </table:table-row>
        <table:table-row table:style-name="Tabla15.1">
          <table:table-cell table:style-name="Tabla15.A8" office:value-type="string">
            <text:p text:style-name="P34" loext:marker-style-name="T91"/>
            <text:p text:style-name="P18" loext:marker-style-name="T85"><text:span text:style-name="T47">C</text:span><text:span text:style-name="T74">o</text:span><text:span text:style-name="T67">m</text:span><text:span text:style-name="T53">p</text:span><text:span text:style-name="T58">r</text:span><text:span text:style-name="T85">a</text:span><text:span text:style-name="T89"> </text:span><text:span text:style-name="T53">d</text:span><text:span text:style-name="T85">e</text:span><text:span text:style-name="T47"> </text:span><text:span text:style-name="T74">c</text:span><text:span text:style-name="T53">u</text:span><text:span text:style-name="T74">y</text:span><text:span text:style-name="T53">e</text:span><text:span text:style-name="T85">s </text:span><text:span text:style-name="T53">pa</text:span><text:span text:style-name="T58">rril</text:span><text:span text:style-name="T63">l</text:span><text:span text:style-name="T53">e</text:span><text:span text:style-name="T58">r</text:span><text:span text:style-name="T53">o</text:span><text:span text:style-name="T85">s</text:span></text:p>
          </table:table-cell>
          <table:table-cell table:style-name="Tabla15.B8" office:value-type="string">
            <text:p text:style-name="P35" loext:marker-style-name="T92"/>
            <text:p text:style-name="P19" loext:marker-style-name="T8"><text:span text:style-name="T45">C</text:span><text:span text:style-name="T51">on</text:span><text:span text:style-name="T56">tr</text:span><text:span text:style-name="T51">a</text:span><text:span text:style-name="T56">t</text:span><text:span text:style-name="T8">o</text:span><text:span text:style-name="T45"> </text:span><text:span text:style-name="T8">d</text:span><text:span text:style-name="T45"> </text:span><text:span text:style-name="T72">co</text:span><text:span text:style-name="T66">m</text:span><text:span text:style-name="T51">p</text:span><text:span text:style-name="T61">r</text:span><text:span text:style-name="T8">a </text:span><text:span text:style-name="T51">ven</text:span><text:span text:style-name="T56">t</text:span><text:span text:style-name="T8">a</text:span><text:span text:style-name="T88"> </text:span><text:span text:style-name="T51">d</text:span><text:span text:style-name="T8">e</text:span><text:span text:style-name="T45"> </text:span><text:span text:style-name="T72">c</text:span><text:span text:style-name="T51">u</text:span><text:span text:style-name="T72">y</text:span><text:span text:style-name="T51">e</text:span><text:span text:style-name="T8">s</text:span></text:p>
          </table:table-cell>
          <table:table-cell table:style-name="Tabla15.C8" office:value-type="string">
            <text:p text:style-name="P21" loext:marker-style-name="T86"><text:span text:style-name="T47">Restaurant Hatun Huasi,</text:span> <text:span text:style-name="T47">Restaurand La Cabaña,</text:span> <text:span text:style-name="T47">Britania S (Puquio)</text:span></text:p>
          </table:table-cell>
          <table:table-cell table:style-name="Tabla15.D8" office:value-type="string">
            <text:p text:style-name="P36" loext:marker-style-name="T93"/>
            <text:p text:style-name="P12" loext:marker-style-name="T85"><text:span text:style-name="T47">C</text:span><text:span text:style-name="T53">o</text:span><text:span text:style-name="T74">n</text:span><text:span text:style-name="T53">c</text:span><text:span text:style-name="T58">r</text:span><text:span text:style-name="T53">e</text:span><text:span text:style-name="T58">t</text:span><text:span text:style-name="T85">a</text:span></text:p>
          </table:table-cell>
        </table:table-row>
        <table:table-row table:style-name="Tabla15.1">
          <table:table-cell table:style-name="Tabla15.A9" office:value-type="string">
            <text:p text:style-name="P30" loext:marker-style-name="T47"/>
            <text:p text:style-name="P18" loext:marker-style-name="T47"><text:span text:style-name="T47">Compra de cuyes parrilleros</text:span><text:span text:style-name="T47"/></text:p>
          </table:table-cell>
          <table:table-cell table:style-name="Tabla15.B9" office:value-type="string">
            <text:p text:style-name="P31" loext:marker-style-name="T45"/>
            <text:p text:style-name="P19" loext:marker-style-name="T45"><text:span text:style-name="T45">Contrato d compra venta de cuyes</text:span><text:span text:style-name="T45"/></text:p>
          </table:table-cell>
          <table:table-cell table:style-name="Tabla15.C9" office:value-type="string">
            <text:p text:style-name="P27" loext:marker-style-name="T48"><text:span text:style-name="T47"><text:s/>Restaurant Peña Turístico Pocho (Lima)</text:span><text:span text:style-name="T48"/></text:p>
          </table:table-cell>
          <table:table-cell table:style-name="Tabla15.D9" office:value-type="string">
            <text:p text:style-name="P38" loext:marker-style-name="T93"/>
            <text:p text:style-name="P28" loext:marker-style-name="T93"><text:span text:style-name="T47">C</text:span><text:span text:style-name="T53">o</text:span><text:span text:style-name="T74">n</text:span><text:span text:style-name="T53">c</text:span><text:span text:style-name="T58">r</text:span><text:span text:style-name="T53">e</text:span><text:span text:style-name="T58">t</text:span><text:span text:style-name="T85">a</text:span></text:p>
          </table:table-cell>
        </table:table-row>
      </table:table>
      <text:p text:style-name="P122" loext:marker-style-name="T13"/>
      <text:p text:style-name="P71" loext:marker-style-name="T19"/>
      <text:list text:continue-numbering="true" text:style-name="WWNum5">
        <text:list-item>
          <text:p text:style-name="P58" loext:marker-style-name="T19"><text:span text:style-name="T13">ESTUDIO DE MERCADO</text:span><text:span text:style-name="T13"/></text:p>
          <text:list>
            <text:list-item>
              <text:p text:style-name="P59" loext:marker-style-name="T13"><text:span text:style-name="T13">CARACTERÍSTICAS DE LA DEMANDA ACTUAL: ¿A quién y donde venderemos nuestro producto y/o servicio luego del cofinanciamiento solicitado?</text:span><text:span text:style-name="T13"/></text:p>
            </text:list-item>
          </text:list>
        </text:list-item>
      </text:list>
      <table:table table:name="Tabla16" table:style-name="Tabla16">
        <table:table-column table:style-name="Tabla16.A"/>
        <text:soft-page-break/>
        <table:table-row table:style-name="Tabla16.1">
          <table:table-cell table:style-name="Tabla16.A1" office:value-type="string">
            <text:p text:style-name="P105" loext:marker-style-name="T33"><text:span text:style-name="T33">Se ha realizado el estudio de los principales factores que inciden en el consumo de cuyes en el ámbito del proyecto, de tal forma que nos ha permitido cuantificar la demanda existente y proyectar la demanda futura. El análisis de la demanda se basa en la segmentación del mercado en el ámbito del distrito de Puquio y la ciudad de Lima.</text:span><text:span text:style-name="T33"/></text:p>
            <text:p text:style-name="P91" loext:marker-style-name="T33"><text:span text:style-name="T15">Tipología del consumidor</text:span><text:span text:style-name="T33">:</text:span></text:p>
            <text:p text:style-name="P91" loext:marker-style-name="T33"><text:span text:style-name="T33"><text:s/>La población del mercado objetivo (recreos) conocen perfectamente el producto (Cuy) y exigen la calidad del producto en tamaño, peso, forma, y libre de enfermedades.</text:span><text:span text:style-name="T33"/></text:p>
            <text:p text:style-name="P91" loext:marker-style-name="T33"><text:span text:style-name="T33">El consumidor final del producto es cada vez más exigente en cuanto al tamaño y la suavidad del producto (cuy), por lo que el personal de compras de los recreos exige cuyes de mayor tamaño, mayor peso, y de forma paralelepípedo para satisfacer las exigencias de sus clientes.</text:span><text:span text:style-name="T33"/></text:p>
            <text:p text:style-name="P91" loext:marker-style-name="T15"><text:span text:style-name="T15">Requerimiento técnico mínimos</text:span><text:span text:style-name="T15"/></text:p>
            <text:p text:style-name="P91" loext:marker-style-name="T33"><text:span text:style-name="T33">La alimentación del cuy es y será a base de forraje verde y concentrado, asegurando así un producto de calidad e inocuo. Lo cual sumado al manejo adecuado garantizará un producto de calidad, cantidad y <text:s text:c="2"/>la provisión continua para el mercado objetivo.</text:span><text:span text:style-name="T33"/></text:p>
            <text:h text:style-name="P55" text:outline-level="2" loext:marker-style-name="T11"/>
          </table:table-cell>
        </table:table-row>
      </table:table>
      <text:p text:style-name="P81" loext:marker-style-name="T13"/>
      <text:list text:continue-numbering="true" text:style-name="WWNum5">
        <text:list-item>
          <text:list>
            <text:list-item>
              <text:p text:style-name="P59" loext:marker-style-name="T13"><text:span text:style-name="T13">PROYECCION DE LA DEMANDA: Se deberá proyectar por lo menos de 5 años </text:span><text:span text:style-name="T13"/></text:p>
            </text:list-item>
          </text:list>
        </text:list-item>
      </text:list>
      <text:p text:style-name="P91" loext:marker-style-name="T19"><text:span text:style-name="T41"><text:s/></text:span><text:span text:style-name="T19">Definir los supuestos y criterios técnicos para proyectar la demanda; de tratarse de un plan de negocio que involucra la demanda de más de un producto, deberá hacer la proyección para cada producto.</text:span></text:p>
      <text:p text:style-name="P91" loext:marker-style-name="T19"><text:span text:style-name="T19">La demanda actual del producto está compuesta por el mercado objetivo determinado para el presente plan de negocios (Recreos de los distritos de Puquio, Recreos ubicado en San Juan de Miraflores Lima ) además de todas aquellas personas y/o empresas que están interesados en comprar y los consumidores finales de cuy parrillero tipo I. quienes comprar el en su local, como también en los centros <text:s/>de producción (galpones) directamente de los productores.</text:span><text:span text:style-name="T19"/></text:p>
      <text:p text:style-name="P173" loext:marker-style-name="T19"/>
      <text:p text:style-name="P91" loext:marker-style-name="T19"><text:span text:style-name="T19">Asimismo, el aumento del consumo se debe también a la promoción de la carne de cuy en la gastronomía y los valores nutricionales del producto por la población en general</text:span><text:span text:style-name="T19"/></text:p>
      <text:p text:style-name="P91" loext:marker-style-name="T19"><text:span text:style-name="T19">No se tiene información precisa del consumo per cápita de la carne de cuy, pero se estima que a la fecha el consumo per cápita de la carne de cuy sobrepasa el kilogramo</text:span><text:span text:style-name="T19"/></text:p>
      <text:p text:style-name="P175" loext:marker-style-name="T97"/>
      <text:p text:style-name="P91" loext:marker-style-name="T97"><text:span text:style-name="T19">Por lo que para determinar la demanda y por ende la proyección de la demanda se ha realizado encuestas en el marco de la elaboración de la Propuesta Productiva (Plan de Negocios) en la que se determinado de demanda semanal de cuyes y tasa de crecimiento de la demanda anual, la cual resulto entre 8% – 12%, siendo el promedio de 10%. Lo cual permitirá realizar las proyecciones durante el horizonte de evaluación del presente Plan de Negocios</text:span><text:span text:style-name="T97">.</text:span></text:p>
      <text:p text:style-name="P175" loext:marker-style-name="T97"/>
      <table:table table:name="Tabla17" table:style-name="Tabla17">
        <table:table-column table:style-name="Tabla17.A"/>
        <table:table-column table:style-name="Tabla17.B"/>
        <table:table-row table:style-name="Tabla17.1">
          <table:table-cell table:style-name="Tabla17.A1" office:value-type="string">
            <text:p text:style-name="P94" loext:marker-style-name="T17"><text:span text:style-name="T17">AÑO</text:span><text:span text:style-name="T17"/></text:p>
          </table:table-cell>
          <table:table-cell table:style-name="Tabla17.B1" office:value-type="string">
            <text:p text:style-name="P94" loext:marker-style-name="T17"><text:span text:style-name="T17">DEMANDA DEL PRODUCTO</text:span><text:span text:style-name="T17"/></text:p>
            <text:p text:style-name="P94" loext:marker-style-name="T17"><text:span text:style-name="T17"><text:s/>(Unidad de Medida)</text:span><text:span text:style-name="T17"/></text:p>
          </table:table-cell>
        </table:table-row>
        <table:table-row table:style-name="Tabla17.2">
          <table:table-cell table:style-name="Tabla17.A2" office:value-type="string">
            <text:p text:style-name="P94" loext:marker-style-name="T35"><text:span text:style-name="T35">2020</text:span><text:span text:style-name="T35"/></text:p>
          </table:table-cell>
          <table:table-cell table:style-name="Tabla17.B2" office:value-type="string">
            <text:p text:style-name="P94" loext:marker-style-name="T22"><text:span text:style-name="T22">42,350</text:span><text:span text:style-name="T22"/></text:p>
          </table:table-cell>
        </table:table-row>
        <table:table-row table:style-name="Tabla17.2">
          <table:table-cell table:style-name="Tabla17.A2" office:value-type="string">
            <text:p text:style-name="P94" loext:marker-style-name="T35"><text:span text:style-name="T35">2021</text:span><text:span text:style-name="T35"/></text:p>
          </table:table-cell>
          <table:table-cell table:style-name="Tabla17.A2" office:value-type="string">
            <text:p text:style-name="P94" loext:marker-style-name="T22"><text:span text:style-name="T22">42,357</text:span><text:span text:style-name="T22"/></text:p>
          </table:table-cell>
        </table:table-row>
        <table:table-row table:style-name="Tabla17.2">
          <table:table-cell table:style-name="Tabla17.A2" office:value-type="string">
            <text:p text:style-name="P94" loext:marker-style-name="T35"><text:span text:style-name="T35">2022</text:span><text:span text:style-name="T35"/></text:p>
          </table:table-cell>
          <table:table-cell table:style-name="Tabla17.A2" office:value-type="string">
            <text:p text:style-name="P94" loext:marker-style-name="T22"><text:span text:style-name="T22">42,364</text:span><text:span text:style-name="T22"/></text:p>
          </table:table-cell>
        </table:table-row>
        <table:table-row table:style-name="Tabla17.2">
          <table:table-cell table:style-name="Tabla17.A2" office:value-type="string">
            <text:p text:style-name="P94" loext:marker-style-name="T35"><text:span text:style-name="T35">2023</text:span><text:span text:style-name="T35"/></text:p>
          </table:table-cell>
          <table:table-cell table:style-name="Tabla17.A2" office:value-type="string">
            <text:p text:style-name="P94" loext:marker-style-name="T22"><text:span text:style-name="T22">42,372</text:span><text:span text:style-name="T22"/></text:p>
          </table:table-cell>
        </table:table-row>
        <table:table-row table:style-name="Tabla17.2">
          <table:table-cell table:style-name="Tabla17.A2" office:value-type="string">
            <text:p text:style-name="P94" loext:marker-style-name="T35"><text:span text:style-name="T35">2024</text:span><text:span text:style-name="T35"/></text:p>
          </table:table-cell>
          <table:table-cell table:style-name="Tabla17.A2" office:value-type="string">
            <text:p text:style-name="P94" loext:marker-style-name="T22"><text:span text:style-name="T22">42,379</text:span><text:span text:style-name="T22"/></text:p>
          </table:table-cell>
        </table:table-row>
        <table:table-row table:style-name="Tabla17.2">
          <table:table-cell table:style-name="Tabla17.A2" office:value-type="string">
            <text:p text:style-name="P94" loext:marker-style-name="T35"><text:span text:style-name="T35">2025</text:span><text:span text:style-name="T35"/></text:p>
          </table:table-cell>
          <table:table-cell table:style-name="Tabla17.A2" office:value-type="string">
            <text:p text:style-name="P94" loext:marker-style-name="T22"><text:span text:style-name="T22">42,386</text:span><text:span text:style-name="T22"/></text:p>
          </table:table-cell>
        </table:table-row>
      </table:table>
      <text:p text:style-name="P81" loext:marker-style-name="T13"/>
      <text:list xml:id="list23958379734040" text:continue-numbering="true" text:style-name="WWNum5">
        <text:list-item>
          <text:list>
            <text:list-item>
              <text:p text:style-name="P59" loext:marker-style-name="T13"><text:span text:style-name="T13">CARACTERISTICAS DE LA OFERTA ACTUAL: Describir las características de los competidores</text:span><text:span text:style-name="T13"/></text:p>
            </text:list-item>
          </text:list>
        </text:list-item>
      </text:list>
      <table:table table:name="Tabla18" table:style-name="Tabla18">
        <table:table-column table:style-name="Tabla18.A"/>
        <text:soft-page-break/>
        <table:table-row table:style-name="Tabla18.1">
          <table:table-cell table:style-name="Tabla18.A1" table:number-rows-spanned="3" office:value-type="string">
            <text:p text:style-name="P90" loext:marker-style-name="T20"><text:span text:style-name="T20">Características de la Oferta Actual:</text:span><text:span text:style-name="T20"/></text:p>
            <text:p text:style-name="P90" loext:marker-style-name="T20"><text:span text:style-name="T20">Para el análisis del nivel de competencia entre los oferentes del cuy, se parte de la siguiente consideración:</text:span><text:span text:style-name="T20"/></text:p>
            <text:list text:style-name="WWNum12">
              <text:list-item>
                <text:p text:style-name="P70" loext:marker-style-name="T20"><text:span text:style-name="T20">Con respecto a la provincia ofertante al mercado de Puquio, es la provincia Lucanas 60% de destino al mercado objetivo, la misma que se observa en la Cuadro siguiente.</text:span></text:p>
              </text:list-item>
            </text:list>
            <text:p text:style-name="P90" loext:marker-style-name="T20"><draw:frame draw:style-name="fr3" draw:name="Imagen 15" text:anchor-type="as-char" svg:width="15.004cm" svg:height="2.15cm" draw:z-index="0"><draw:image xlink:href="Pictures/10000001000003760000007F8196553F.png" xlink:type="simple" xlink:show="embed" xlink:actuate="onLoad" draw:mime-type="image/png"/></draw:frame></text:p>
            <text:p text:style-name="P98" loext:marker-style-name="T20"/>
            <text:p text:style-name="P76" loext:marker-style-name="T20"/>
          </table:table-cell>
        </table:table-row>
        <table:table-row table:style-name="Tabla18.1">
          <table:covered-table-cell table:style-name="Tabla18.A2"/>
        </table:table-row>
        <table:table-row table:style-name="Tabla18.1">
          <table:covered-table-cell table:style-name="Tabla18.A3"/>
        </table:table-row>
      </table:table>
      <text:p text:style-name="P118" loext:marker-style-name="T41"/>
      <text:list text:continue-list="list23958379734040" text:style-name="WWNum5">
        <text:list-item>
          <text:list>
            <text:list-item>
              <text:p text:style-name="P59" loext:marker-style-name="T13"><text:span text:style-name="T13">PROYECCION DE LA OFERTA: </text:span><text:span text:style-name="T13"/></text:p>
            </text:list-item>
          </text:list>
        </text:list-item>
      </text:list>
      <text:p text:style-name="P90" loext:marker-style-name="T19"><text:span text:style-name="T19">Definir los supuestos y criterios técnicos para proyectar la oferta; de tratarse de un plan de negocio que involucra el análisis de la oferta de más de un producto, deberá hacer la proyección para cada producto.</text:span><text:span text:style-name="T19"/></text:p>
      <table:table table:name="Tabla19" table:style-name="Tabla19">
        <table:table-column table:style-name="Tabla19.A"/>
        <table:table-column table:style-name="Tabla19.B"/>
        <table:table-row table:style-name="Tabla19.1">
          <table:table-cell table:style-name="Tabla19.A1" office:value-type="string">
            <text:p text:style-name="P94" loext:marker-style-name="T17"><text:span text:style-name="T17">AÑO</text:span><text:span text:style-name="T17"/></text:p>
          </table:table-cell>
          <table:table-cell table:style-name="Tabla19.B1" office:value-type="string">
            <text:p text:style-name="P94" loext:marker-style-name="T17"><text:span text:style-name="T17">OFERTA CON PROYECTO (Unidad de medida)</text:span><text:span text:style-name="T17"/></text:p>
          </table:table-cell>
        </table:table-row>
        <table:table-row table:style-name="Tabla19.2">
          <table:table-cell table:style-name="Tabla19.A2" office:value-type="string">
            <text:p text:style-name="P94" loext:marker-style-name="T35"><text:span text:style-name="T35">2020</text:span><text:span text:style-name="T35"/></text:p>
          </table:table-cell>
          <table:table-cell table:style-name="Tabla19.B2" office:value-type="string">
            <text:p text:style-name="P94" loext:marker-style-name="T23"><text:span text:style-name="T23">15,043</text:span><text:span text:style-name="T23"/></text:p>
          </table:table-cell>
        </table:table-row>
        <table:table-row table:style-name="Tabla19.2">
          <table:table-cell table:style-name="Tabla19.A2" office:value-type="string">
            <text:p text:style-name="P94" loext:marker-style-name="T35"><text:span text:style-name="T35">2021</text:span><text:span text:style-name="T35"/></text:p>
          </table:table-cell>
          <table:table-cell table:style-name="Tabla19.B3" office:value-type="string">
            <text:p text:style-name="P94" loext:marker-style-name="T23"><text:span text:style-name="T23">15,216</text:span><text:span text:style-name="T23"/></text:p>
          </table:table-cell>
        </table:table-row>
        <table:table-row table:style-name="Tabla19.2">
          <table:table-cell table:style-name="Tabla19.A2" office:value-type="string">
            <text:p text:style-name="P94" loext:marker-style-name="T35"><text:span text:style-name="T35">2022</text:span><text:span text:style-name="T35"/></text:p>
          </table:table-cell>
          <table:table-cell table:style-name="Tabla19.B3" office:value-type="string">
            <text:p text:style-name="P94" loext:marker-style-name="T23"><text:span text:style-name="T23">15,389</text:span><text:span text:style-name="T23"/></text:p>
          </table:table-cell>
        </table:table-row>
        <table:table-row table:style-name="Tabla19.2">
          <table:table-cell table:style-name="Tabla19.A2" office:value-type="string">
            <text:p text:style-name="P94" loext:marker-style-name="T35"><text:span text:style-name="T35">2023</text:span><text:span text:style-name="T35"/></text:p>
          </table:table-cell>
          <table:table-cell table:style-name="Tabla19.B3" office:value-type="string">
            <text:p text:style-name="P94" loext:marker-style-name="T23"><text:span text:style-name="T23">15,562</text:span><text:span text:style-name="T23"/></text:p>
          </table:table-cell>
        </table:table-row>
        <table:table-row table:style-name="Tabla19.2">
          <table:table-cell table:style-name="Tabla19.A2" office:value-type="string">
            <text:p text:style-name="P94" loext:marker-style-name="T35"><text:span text:style-name="T35">2024</text:span><text:span text:style-name="T35"/></text:p>
          </table:table-cell>
          <table:table-cell table:style-name="Tabla19.B3" office:value-type="string">
            <text:p text:style-name="P94" loext:marker-style-name="T23"><text:span text:style-name="T23">15,735</text:span><text:span text:style-name="T23"/></text:p>
          </table:table-cell>
        </table:table-row>
        <table:table-row table:style-name="Tabla19.2">
          <table:table-cell table:style-name="Tabla19.A2" office:value-type="string">
            <text:p text:style-name="P94" loext:marker-style-name="T35"><text:span text:style-name="T35">2025</text:span><text:span text:style-name="T35"/></text:p>
          </table:table-cell>
          <table:table-cell table:style-name="Tabla19.B3" office:value-type="string">
            <text:p text:style-name="P94" loext:marker-style-name="T23"><text:span text:style-name="T23">15,908</text:span><text:span text:style-name="T23"/></text:p>
          </table:table-cell>
        </table:table-row>
      </table:table>
      <text:p text:style-name="P118" loext:marker-style-name="T41"/>
      <text:list xml:id="list23959157071728" text:continue-numbering="true" text:style-name="WWNum5">
        <text:list-item>
          <text:list>
            <text:list-item>
              <text:p text:style-name="P59" loext:marker-style-name="T13"><text:span text:style-name="T13">BRECHA DEMANDA Y OFERTA: En el marco de la estructura de mercado existente; con el propósito de evaluar la viabilidad de mercado, teniendo en cuenta los riesgos existentes.</text:span><text:span text:style-name="T13"/></text:p>
            </text:list-item>
          </text:list>
        </text:list-item>
      </text:list>
      <text:list text:style-name="WWNum13">
        <text:list-item>
          <text:p text:style-name="P64" loext:marker-style-name="T19"><text:span text:style-name="T19">Demanda: unidades de producto que requiere los consumidores del segmento de mercado.</text:span><text:span text:style-name="T19"/></text:p>
        </text:list-item>
        <text:list-item>
          <text:p text:style-name="P64" loext:marker-style-name="T19"><text:span text:style-name="T19"><text:s/>Oferta: unidades de producto ofrecido por los agentes económicos al segmento de mercado.</text:span><text:span text:style-name="T19"/></text:p>
        </text:list-item>
      </text:list>
      <text:p text:style-name="P91" loext:marker-style-name="T19"><text:span text:style-name="T19">En base a lo anterior se determinó la brecha demanda-oferta, en el marco de la estructura de mercado existente; con el propósito de evaluar la viabilidad de mercado, teniendo en cuenta los riesgos existentes.</text:span><text:span text:style-name="T19"/></text:p>
      <table:table table:name="Tabla20" table:style-name="Tabla20">
        <table:table-column table:style-name="Tabla20.A"/>
        <table:table-column table:style-name="Tabla20.B"/>
        <table:table-column table:style-name="Tabla20.C"/>
        <table:table-column table:style-name="Tabla20.D"/>
        <text:soft-page-break/>
        <table:table-row table:style-name="Tabla20.1">
          <table:table-cell table:style-name="Tabla20.A1" office:value-type="string">
            <text:p text:style-name="P94" loext:marker-style-name="T17"><text:span text:style-name="T17">AÑO</text:span><text:span text:style-name="T17"/></text:p>
          </table:table-cell>
          <table:table-cell table:style-name="Tabla20.B1" office:value-type="string">
            <text:p text:style-name="P94" loext:marker-style-name="T17"><text:span text:style-name="T17">DEMANDA</text:span><text:span text:style-name="T17"/></text:p>
          </table:table-cell>
          <table:table-cell table:style-name="Tabla20.B1" office:value-type="string">
            <text:p text:style-name="P94" loext:marker-style-name="T17"><text:span text:style-name="T17">OFERTA</text:span><text:span text:style-name="T17"/></text:p>
          </table:table-cell>
          <table:table-cell table:style-name="Tabla20.B1" office:value-type="string">
            <text:p text:style-name="P94" loext:marker-style-name="T17"><text:span text:style-name="T17">BRECHA</text:span><text:span text:style-name="T17"/></text:p>
          </table:table-cell>
        </table:table-row>
        <table:table-row table:style-name="Tabla20.1">
          <table:table-cell table:style-name="Tabla20.A2" office:value-type="string">
            <text:p text:style-name="P94" loext:marker-style-name="T35"><text:span text:style-name="T35">2020</text:span><text:span text:style-name="T35"/></text:p>
          </table:table-cell>
          <table:table-cell table:style-name="Tabla20.B2" office:value-type="string">
            <text:p text:style-name="P125" loext:marker-style-name="T23"><text:span text:style-name="T23">42,350</text:span><text:span text:style-name="T23"/></text:p>
          </table:table-cell>
          <table:table-cell table:style-name="Tabla20.C2" office:value-type="string">
            <text:p text:style-name="P125" loext:marker-style-name="T23"><text:span text:style-name="T23">15,043</text:span><text:span text:style-name="T23"/></text:p>
          </table:table-cell>
          <table:table-cell table:style-name="Tabla20.C2" office:value-type="string">
            <text:p text:style-name="P125" loext:marker-style-name="T23"><text:span text:style-name="T23">27,307</text:span><text:span text:style-name="T23"/></text:p>
          </table:table-cell>
        </table:table-row>
        <table:table-row table:style-name="Tabla20.1">
          <table:table-cell table:style-name="Tabla20.A2" office:value-type="string">
            <text:p text:style-name="P94" loext:marker-style-name="T35"><text:span text:style-name="T35">2021</text:span><text:span text:style-name="T35"/></text:p>
          </table:table-cell>
          <table:table-cell table:style-name="Tabla20.A2" office:value-type="string">
            <text:p text:style-name="P125" loext:marker-style-name="T23"><text:span text:style-name="T23">42,357</text:span><text:span text:style-name="T23"/></text:p>
          </table:table-cell>
          <table:table-cell table:style-name="Tabla20.C3" office:value-type="string">
            <text:p text:style-name="P125" loext:marker-style-name="T23"><text:span text:style-name="T23">15,216</text:span><text:span text:style-name="T23"/></text:p>
          </table:table-cell>
          <table:table-cell table:style-name="Tabla20.C3" office:value-type="string">
            <text:p text:style-name="P125" loext:marker-style-name="T23"><text:span text:style-name="T23">27,141</text:span><text:span text:style-name="T23"/></text:p>
          </table:table-cell>
        </table:table-row>
        <table:table-row table:style-name="Tabla20.1">
          <table:table-cell table:style-name="Tabla20.A2" office:value-type="string">
            <text:p text:style-name="P94" loext:marker-style-name="T35"><text:span text:style-name="T35">2022</text:span><text:span text:style-name="T35"/></text:p>
          </table:table-cell>
          <table:table-cell table:style-name="Tabla20.A2" office:value-type="string">
            <text:p text:style-name="P125" loext:marker-style-name="T23"><text:span text:style-name="T23">42,364</text:span><text:span text:style-name="T23"/></text:p>
          </table:table-cell>
          <table:table-cell table:style-name="Tabla20.C3" office:value-type="string">
            <text:p text:style-name="P125" loext:marker-style-name="T23"><text:span text:style-name="T23">15,389</text:span><text:span text:style-name="T23"/></text:p>
          </table:table-cell>
          <table:table-cell table:style-name="Tabla20.C3" office:value-type="string">
            <text:p text:style-name="P125" loext:marker-style-name="T23"><text:span text:style-name="T23">26,975</text:span><text:span text:style-name="T23"/></text:p>
          </table:table-cell>
        </table:table-row>
        <table:table-row table:style-name="Tabla20.1">
          <table:table-cell table:style-name="Tabla20.A2" office:value-type="string">
            <text:p text:style-name="P94" loext:marker-style-name="T35"><text:span text:style-name="T35">2023</text:span><text:span text:style-name="T35"/></text:p>
          </table:table-cell>
          <table:table-cell table:style-name="Tabla20.A2" office:value-type="string">
            <text:p text:style-name="P125" loext:marker-style-name="T23"><text:span text:style-name="T23">42,372</text:span><text:span text:style-name="T23"/></text:p>
          </table:table-cell>
          <table:table-cell table:style-name="Tabla20.C3" office:value-type="string">
            <text:p text:style-name="P125" loext:marker-style-name="T23"><text:span text:style-name="T23">15,562</text:span><text:span text:style-name="T23"/></text:p>
          </table:table-cell>
          <table:table-cell table:style-name="Tabla20.C3" office:value-type="string">
            <text:p text:style-name="P125" loext:marker-style-name="T23"><text:span text:style-name="T23">26,809</text:span><text:span text:style-name="T23"/></text:p>
          </table:table-cell>
        </table:table-row>
        <table:table-row table:style-name="Tabla20.1">
          <table:table-cell table:style-name="Tabla20.A2" office:value-type="string">
            <text:p text:style-name="P94" loext:marker-style-name="T35"><text:span text:style-name="T24">2024</text:span><text:span text:style-name="T20"/></text:p>
          </table:table-cell>
          <table:table-cell table:style-name="Tabla20.A2" office:value-type="string">
            <text:p text:style-name="P125" loext:marker-style-name="T23"><text:span text:style-name="T23">42,379</text:span><text:span text:style-name="T23"/></text:p>
          </table:table-cell>
          <table:table-cell table:style-name="Tabla20.C3" office:value-type="string">
            <text:p text:style-name="P125" loext:marker-style-name="T23"><text:span text:style-name="T23">15,735</text:span><text:span text:style-name="T23"/></text:p>
          </table:table-cell>
          <table:table-cell table:style-name="Tabla20.C3" office:value-type="string">
            <text:p text:style-name="P125" loext:marker-style-name="T23"><text:span text:style-name="T23">26,644</text:span><text:span text:style-name="T23"/></text:p>
          </table:table-cell>
        </table:table-row>
        <table:table-row table:style-name="Tabla20.1">
          <table:table-cell table:style-name="Tabla20.A2" office:value-type="string">
            <text:p text:style-name="P94" loext:marker-style-name="T35"><text:span text:style-name="T35">2025</text:span><text:span text:style-name="T35"/></text:p>
          </table:table-cell>
          <table:table-cell table:style-name="Tabla20.A2" office:value-type="string">
            <text:p text:style-name="P125" loext:marker-style-name="T23"><text:span text:style-name="T23">42,386</text:span><text:span text:style-name="T23"/></text:p>
          </table:table-cell>
          <table:table-cell table:style-name="Tabla20.C3" office:value-type="string">
            <text:p text:style-name="P125" loext:marker-style-name="T23"><text:span text:style-name="T23">15,908</text:span><text:span text:style-name="T23"/></text:p>
          </table:table-cell>
          <table:table-cell table:style-name="Tabla20.C3" office:value-type="string">
            <text:p text:style-name="P125" loext:marker-style-name="T23"><text:span text:style-name="T23">26,478</text:span><text:span text:style-name="T23"/></text:p>
          </table:table-cell>
        </table:table-row>
      </table:table>
      <text:p text:style-name="P90" loext:marker-style-name="T41"><text:span text:style-name="T41"><text:s text:c="57"/>Fuente: elaboración propia </text:span><text:span text:style-name="T41"/></text:p>
      <text:list xml:id="list23957581543906" text:continue-list="list23959157071728" text:style-name="WWNum5">
        <text:list-item>
          <text:list>
            <text:list-item>
              <text:p text:style-name="P59" loext:marker-style-name="T13"><text:span text:style-name="T13">ESTRATEGIA DE MARKETING: Se debe señalar como se logrará la ventaja competitiva necesaria para que los bienes y servicios generados por la propuesta productiva, sean demandados efectivamente por el público objetivo</text:span><text:span text:style-name="T13"/></text:p>
            </text:list-item>
          </text:list>
        </text:list-item>
      </text:list>
      <table:table table:name="Tabla21" table:style-name="Tabla21">
        <table:table-column table:style-name="Tabla21.A"/>
        <table:table-column table:style-name="Tabla21.B"/>
        <table:table-row table:style-name="Tabla21.1">
          <table:table-cell table:style-name="Tabla21.A1" office:value-type="string">
            <text:p text:style-name="P48" loext:marker-style-name="T12"><text:span text:style-name="T12">Estrategia de producto</text:span><text:span text:style-name="T12"/></text:p>
          </table:table-cell>
          <table:table-cell table:style-name="Tabla21.A1" office:value-type="string">
            <text:p text:style-name="P90" loext:marker-style-name="T41"><text:span text:style-name="T41">DESCRIPCIÓN<text:tab/>PRODUCTO</text:span><text:span text:style-name="T41"/></text:p>
            <text:p text:style-name="P90" loext:marker-style-name="T41"><text:span text:style-name="T41">Nombre comercial<text:tab/>Cuy en pie</text:span></text:p>
            <text:p text:style-name="P90" loext:marker-style-name="T41"><text:span text:style-name="T41">Descripción del producto: Cuy en pie, de 2.5 a 3 meses de 0.9 <text:s/>- 1.0 kg.</text:span><text:span text:style-name="T41"/></text:p>
            <text:p text:style-name="P91" loext:marker-style-name="T41"><text:span text:style-name="T41">Características<text:tab/>Cuyes mejorados, de conformación física semejante a un paralelepípedo, de temperamento tranquilo. Pesos uniformes y cuyes tiernos (venta antes de los 3 meses).</text:span><text:span text:style-name="T41"/></text:p>
            <text:p text:style-name="P91" loext:marker-style-name="T41"><text:span text:style-name="T41">Empaque<text:tab/>En jabas (20 cuyes/jaba)</text:span><text:span text:style-name="T41"/></text:p>
            <text:p text:style-name="P91" loext:marker-style-name="T41"><text:span text:style-name="T41">Proceso de selección del producto<text:tab/>El producto se seleccionará de acuerdo a unas características externas: colores claros, cuello ancho, pelo corto y liso, buen estado sanitario, peso de 0.9 – 1.0 kg.</text:span><text:span text:style-name="T41"/></text:p>
            <text:p text:style-name="P91" loext:marker-style-name="T41"><text:span text:style-name="T41">Producción<text:tab/>Pamparque- Puquio</text:span><text:span text:style-name="T41"/></text:p>
            <text:p text:style-name="P91" loext:marker-style-name="T41"><text:span text:style-name="T41">Pago: Esmeralda / Distrito: Puquio / Provincia: Lucanas</text:span><text:span text:style-name="T41"/></text:p>
            <text:p text:style-name="P91" loext:marker-style-name="T41"><text:span text:style-name="T41">Precio de venta<text:tab/>El precio de venta será de S/.18.00/cuy</text:span><text:span text:style-name="T41"/></text:p>
            <text:p text:style-name="P91" loext:marker-style-name="T41"><text:span text:style-name="T41">Composición /propiedades<text:tab/>Su carne es apreciada por sus dotes de: suavidad, palatabilidad, calidad proteica y digestibilidad</text:span><text:span text:style-name="T41"/></text:p>
            <text:p text:style-name="P118" loext:marker-style-name="T41"/>
          </table:table-cell>
        </table:table-row>
        <table:table-row table:style-name="Tabla21.1">
          <table:table-cell table:style-name="Tabla21.A1" office:value-type="string">
            <text:p text:style-name="P48" loext:marker-style-name="T11"><text:span text:style-name="T11">Estrategia de precio</text:span><text:span text:style-name="T11"/></text:p>
          </table:table-cell>
          <table:table-cell table:style-name="Tabla21.A1" office:value-type="string">
            <text:p text:style-name="P90" loext:marker-style-name="T41"><text:span text:style-name="T41">La Organización desde sus inicios ha empezado a comercializar el producto a S/. 18 soles. Estos últimos se comercializan con las exigencias de los compradores como libre de enfermedades, parásitos externos, forma paralelepípedo y un peso de 0.9 – 1.1 kg. <text:s/>El incremento de los precios se debe principalmente al incremento del consumo per cápita y hábito de consumo de la población</text:span><text:span text:style-name="T41"/></text:p>
          </table:table-cell>
        </table:table-row>
        <table:table-row table:style-name="Tabla21.3">
          <table:table-cell table:style-name="Tabla21.A1" office:value-type="string">
            <text:p text:style-name="P90" loext:marker-style-name="T18"><text:span text:style-name="T13">Estrategia de Plaza</text:span><text:span text:style-name="T18"/></text:p>
          </table:table-cell>
          <table:table-cell table:style-name="Tabla21.A1" office:value-type="string">
            <text:p text:style-name="P90" loext:marker-style-name="T41"><text:span text:style-name="T41">La estrategia de comercialización será de manera directa al mercado objetivo (recreos de los distritos de Puquio y Lima).</text:span><text:span text:style-name="T41"/></text:p>
            <text:p text:style-name="P124" loext:marker-style-name="T18"><draw:custom-shape text:anchor-type="char" draw:z-index="28" draw:name="Rectángulo 22387" draw:style-name="gr2" draw:text-style-name="P187" svg:width="2.474cm" svg:height="1.71cm" svg:x="4.35cm" svg:y="0.141cm"><text:p text:style-name="P51" loext:marker-style-name="T99"><text:span text:style-name="T98">RECREOS DE PUQUIO Y LIMA</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Rectángulo 7" draw:style-name="gr1" draw:text-style-name="P187" svg:width="2.541cm" svg:height="1.601cm" svg:x="0.335cm" svg:y="0.235cm"><text:p text:style-name="P52" loext:marker-style-name="T98"><text:span text:style-name="T98">ASOCIACIÓN DE PRODUCTORES PAMPARQU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4" loext:marker-style-name="T18"><draw:custom-shape text:anchor-type="char" draw:z-index="26" draw:name="Rectángulo 64" draw:style-name="gr4" draw:text-style-name="P187" svg:width="1.59cm" svg:height="1.359cm" svg:x="8.618cm" svg:y="-0.025cm"><text:p text:style-name="P52" loext:marker-style-name="T98"><text:span text:style-name="T98">CONSUMIDOR FINAL</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4" loext:marker-style-name="T18"><draw:custom-shape text:anchor-type="char" draw:z-index="27" draw:name="Conector recto de flecha 22389" draw:style-name="gr3" draw:text-style-name="P188" svg:width="5.703cm" svg:height="0.043cm" svg:x="2.909cm" svg:y="0.05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P124" loext:marker-style-name="T18"/>
            <text:p text:style-name="P118" loext:marker-style-name="T41"/>
          </table:table-cell>
        </table:table-row>
        <table:table-row table:style-name="Tabla21.4">
          <table:table-cell table:style-name="Tabla21.A1" office:value-type="string">
            <text:p text:style-name="P48" loext:marker-style-name="T100"><text:span text:style-name="T12">Estrategia de Promociones</text:span><text:span text:style-name="T12"/></text:p>
          </table:table-cell>
          <table:table-cell table:style-name="Tabla21.A1" office:value-type="string">
            <text:list text:style-name="WWNum14">
              <text:list-item>
                <text:p text:style-name="P65" loext:marker-style-name="T19"><text:span text:style-name="T19">Se participará en ferias locales y regionales (semana santa), la articulación al mercado regional será en base a contratos de compra venta de cuyes parrilleros, ofertas de promoción y degustación en las ferias.</text:span><text:span text:style-name="T19"/></text:p>
                <text:list>
                  <text:list-item>
                    <text:p text:style-name="P66" loext:marker-style-name="T19"><text:span text:style-name="T19">La perspectiva venta en el mercado local serán altas ya que se ofrecerán productos de calidad y de gran valor nutricional.</text:span><text:span text:style-name="T19"/></text:p>
                  </text:list-item>
                  <text:list-item>
                    <text:p text:style-name="P66" loext:marker-style-name="T19"><text:span text:style-name="T19">Realizar actividades como el FESTIVAL DEL CUY (en el marco de la ejecución de los Planes de Negocios ganadores de PROCOMPITE REGIONAL 2020), con participación de los diferentes actores a fin de promocionar el consumo del producto En la que se promocione las bondades del producto, valor nutricional en beneficio de los AEOs y de los productores en general.</text:span><text:span text:style-name="T19"/></text:p>
                  </text:list-item>
                  <text:list-item>
                    <text:p text:style-name="P66" loext:marker-style-name="T19"><text:span text:style-name="T19">Tarjeta de presentación: Consistirá en una tarjeta con una breve descripción de la Asociación, contactos y detalles de los atributos del producto. Para la seriedad del negocio se planteará firmar contrato de compra y venta como las que se tiene, donde se especifique los requisitos de entrega del producto como: cantidad, precio, calidad, entrega oportuna y penalidades por el incumplimiento de dicha contrata.</text:span><text:span text:style-name="T19"/></text:p>
                  </text:list-item>
                </text:list>
              </text:list-item>
              <text:list-item>
                <text:p text:style-name="P65" loext:marker-style-name="T19"><text:span text:style-name="T19">Asimismo <text:s text:c="3"/>el AEO, realizará y/o tendrá un control de <text:s/>calidad <text:s/>en <text:s/>los procesos, productividad, personal y la presencia a fin de mejorar la competitividad de la cadena productiva de cuy.</text:span><text:span text:style-name="T19"/></text:p>
              </text:list-item>
            </text:list>
          </table:table-cell>
        </table:table-row>
      </table:table>
      <text:p text:style-name="P82" loext:marker-style-name="T13"/>
      <text:list text:continue-list="list23957581543906" text:style-name="WWNum5">
        <text:list-item>
          <text:p text:style-name="P58" loext:marker-style-name="T13"><text:span text:style-name="T13">ESTUDIO TECNICO </text:span><text:span text:style-name="T13"/></text:p>
          <text:list>
            <text:list-item>
              <text:p text:style-name="P59" loext:marker-style-name="T19"><text:span text:style-name="T13">DESCRIPCION DEL PROCESO DE PRODUCCION: deberá describir brevemente el proceso de producción, y definir cada línea de producción</text:span><text:span text:style-name="T19">. </text:span></text:p>
            </text:list-item>
          </text:list>
        </text:list-item>
      </text:list>
      <table:table table:name="Tabla22" table:style-name="Tabla22">
        <table:table-column table:style-name="Tabla22.A"/>
        <table:table-row table:style-name="Tabla22.1">
          <table:table-cell table:style-name="Tabla22.A1" office:value-type="string">
            <text:p text:style-name="P91" loext:marker-style-name="T41"><text:span text:style-name="T41">Producción: Consiste en la crianza de cuyes de la raza y/o línea Perú, Andina (Perú como reproductores por su precocidad y la Andina como reproductoras por <text:s text:c="2"/>su <text:s text:c="2"/>prolificidad) con <text:s text:c="2"/>la <text:s text:c="2"/>finalidad <text:s text:c="2"/>de <text:s text:c="2"/>obtener <text:s text:c="2"/>productos (cuyes parrilleros) de calidad y alta productividad por galpón.</text:span><text:span text:style-name="T41"/></text:p>
            <text:p text:style-name="P91" loext:marker-style-name="T41"><text:span text:style-name="T41">El proceso productivo se desarrolla dentro de los galpones iniciándose en: adquisición de reproductores, empadre, preñez, parto, lactancia, destete recría y saca. Dentro del proceso de manejo se seleccionan los mejores cuyes destetados para futuros reproductores. <text:s/>La alimentación de los cuyes es a base de alfalfa y concentrado a fin de obtener un producto de calidad y a menor tiempo. Esta actividad lo realizan cada uno de los por lo que existe la dificultad de hacer crianza rentable.</text:span><text:span text:style-name="T41"/></text:p>
            <text:p text:style-name="P118" loext:marker-style-name="T41"/>
          </table:table-cell>
        </table:table-row>
      </table:table>
      <text:p text:style-name="P81" loext:marker-style-name="T13"/>
      <text:list xml:id="list23958279326208" text:continue-numbering="true" text:style-name="WWNum5">
        <text:list-item>
          <text:list>
            <text:list-item>
              <text:p text:style-name="P60" loext:marker-style-name="T13"><text:span text:style-name="T13">MEJORA TECNOLOGICA PROPUESTA: Señalar si se proponen innovaciones de proceso, es decir la implementación de un método de producción o distribución nuevo o con un alto grado de mejora. De ser el caso, se debe señalar las mejoras importantes en técnicas, presentación del producto, equipo y/o software.</text:span><text:span text:style-name="T13"/></text:p>
            </text:list-item>
          </text:list>
        </text:list-item>
      </text:list>
      <table:table table:name="Tabla23" table:style-name="Tabla23">
        <table:table-column table:style-name="Tabla23.A"/>
        <table:table-row table:style-name="Tabla23.1">
          <table:table-cell table:style-name="Tabla23.A1" office:value-type="string">
            <text:p text:style-name="P94" loext:marker-style-name="T35"><text:span text:style-name="T35">Señalar las innovaciones que se propone</text:span></text:p>
            <text:p text:style-name="P176" loext:marker-style-name="T26"><text:span text:style-name="T25">Para el proceso de producción</text:span><text:span text:style-name="T26">:</text:span></text:p>
            <text:list text:style-name="WWNum15">
              <text:list-item>
                <text:p text:style-name="P106" loext:marker-style-name="T28"><text:span text:style-name="T27">Ampliación del piso forrajero</text:span><text:span text:style-name="T28">: La adquisición de semilla de alfalfa (31.00 kg) permitirá la ampliación del piso forrajero (1.25 Has) para la alimentación de los cuyes.</text:span></text:p>
              </text:list-item>
            </text:list>
            <text:p text:style-name="P101" loext:marker-style-name="T28"/>
            <text:list text:continue-numbering="true" text:style-name="WWNum15">
              <text:list-item>
                <text:p text:style-name="P106" loext:marker-style-name="T28"><text:span text:style-name="T27">Tecnificación del sistema de riego</text:span><text:span text:style-name="T28">: La adquisición de Aspersor circular ibis 1" para Presión 4 bares (31 unidades) y Manguera HDP DIAM 1” X 100 M (31 Unidades)</text:span></text:p>
              </text:list-item>
            </text:list>
            <text:p text:style-name="P101" loext:marker-style-name="T28"/>
            <text:list text:continue-numbering="true" text:style-name="WWNum15">
              <text:list-item>
                <text:p text:style-name="P106" loext:marker-style-name="T28"><text:span text:style-name="T27">Mejoramiento del transporte de forraje verde (alfalfa</text:span><text:span text:style-name="T28">): La adquisición del Moto carga (01 unidades) facilitará el transporte de alfalfa desde los campos hacia los galpones, esto debido a que los campos de alfalfa se encuentran distantes de los galpones. La adopción de dicha tecnología permitirá reducir los costos de producción en alimentación y mayor disponibilidad de alimentos para los cuyes (a la fecha los productores transportan en servicios de terceros y al hombro).</text:span></text:p>
              </text:list-item>
            </text:list>
            <text:p text:style-name="P107" loext:marker-style-name="T28"><text:span text:style-name="T28"/></text:p>
            <text:list text:continue-numbering="true" text:style-name="WWNum15">
              <text:list-item>
                <text:p text:style-name="P106" loext:marker-style-name="T28"><text:span text:style-name="T27">Implementación</text:span><text:span text:style-name="T28"> </text:span><text:span text:style-name="T27">del Forraje Verde Hidropónico </text:span><text:span text:style-name="T28">(FVH) el cual es el resultado del proceso de germinación de granos de cereales (cebada, avena, trigo y maíz), que se realiza durante un periodo de 10 a 15 días captando la energía del sol, utilizando técnicas de hidroponía sin ningún sustrato. Para lo cual se adquirirá 80 bandejas pre germinadoras.</text:span></text:p>
              </text:list-item>
            </text:list>
            <text:p text:style-name="P101" loext:marker-style-name="T28"/>
            <text:list text:continue-numbering="true" text:style-name="WWNum15">
              <text:list-item>
                <text:p text:style-name="P106" loext:marker-style-name="T28"><text:span text:style-name="T27">Mejoramiento, ampliación <text:s/>y la implementación de los galpones</text:span><text:span text:style-name="T28">: La adquisición de: <text:s/>Gazaperas galvanizado (176 unidades), <text:s/>comedero tipo tolva de aluminio cap. 4.0 kg (176 unidades, <text:s/>forrajeras (176 unidades, jabas de manejo 35*52*36 cm (80 unidades), bebederos automáticos tipo chupón (352 unidades) <text:s/>calamina de 0.22*3.60*0.8 m (208 unidades), calamina transparente 3.60*0.8 m (Fibra forte 16 unidades), <text:s/>Malla revestido venilo color verde <text:s/>3/4x3/4" calib 1 mm x30 m (16 Rollos), Termómetro máximo – mínimo (8 <text:s/>unidades); permitirá el mejoramiento, ampliación <text:s/>y la implementación de los galpones adecuadamente, esto para realizar un manejo adecuado de los cuyes y tener mayor limpieza. La adquisición de termómetro de máximo y mínimo a fin de poder hacer un control de la temperatura máxima y mínima en los galpones durante el día y así poder darles las condiciones de confort a los animales para una adecuada fase reproductiva y productiva.</text:span></text:p>
              </text:list-item>
            </text:list>
            <text:p text:style-name="P101" loext:marker-style-name="T28"/>
            <text:list text:continue-numbering="true" text:style-name="WWNum15">
              <text:list-item>
                <text:p text:style-name="P106" loext:marker-style-name="T28"><text:span text:style-name="T27">Mejoramiento genético de los reproductores</text:span><text:span text:style-name="T28">: la adquisición de 100 reproductores (15 macho + 85 hembras) de reproductores de cuy de línea Perú, Inti y Andina por parte de la Asociación de Productores, como aporte en efectivo. La adquisición de los reproductores permitirá realizar el mejoramiento genético de la población de reproductores para mejorar la productividad, producción y la calidad del producto.</text:span></text:p>
              </text:list-item>
            </text:list>
            <text:p text:style-name="P101" loext:marker-style-name="T28"/>
            <text:list text:continue-numbering="true" text:style-name="WWNum15">
              <text:list-item>
                <text:p text:style-name="P106" loext:marker-style-name="T28"><text:span text:style-name="T27">Control Adecuado y oportuno de Enfermedades</text:span><text:span text:style-name="T28">: la adquisición de 31 kit veterinarios.</text:span></text:p>
              </text:list-item>
            </text:list>
            <text:p text:style-name="P102" loext:marker-style-name="T28"/>
            <text:list text:continue-numbering="true" text:style-name="WWNum15">
              <text:list-item>
                <text:p text:style-name="P106" loext:marker-style-name="T28"><text:span text:style-name="T27">Fortalecimiento de las capacidades técnico </text:span><text:span text:style-name="T28">- <text:s/>productivas y gestión empresarial: La asistencia técnica en el proceso productivo de la crianza de cuy (manejo, alimentación, prevención y/o tratamiento de enfermedades, infraestructura, <text:s/>bioseguridad, sistemas de alimentación, tipos de alimentación, forrajes para la alimentación de cuyes, mejoramiento genéticos <text:s/>e innovaciones tecnológicas) permitirá a los socios del AEO innovar su sistema de crianza, pasando así del sistema de crianza familiar comercial a comercial. Mientras la capacitación en Gestión empresarial permitirá al AEO conocer el mercado, ingresos, egresos y otros de su actividad.</text:span></text:p>
              </text:list-item>
            </text:list>
            <text:p text:style-name="P108" loext:marker-style-name="T29"><text:span text:style-name="T29">Para el proceso de comercialización.</text:span><text:span text:style-name="T29"/></text:p>
            <text:list text:style-name="WWNum17">
              <text:list-item>
                <text:p text:style-name="P109" loext:marker-style-name="T28"><text:span text:style-name="T27">Control de calidad a la saca</text:span><text:span text:style-name="T28">: Balanza digital (8 unidades), esto con la finalidad de realizar el control de peso de los cuyes en la etapa de manejo, saca. Asimismo, la balanza se empleará para el peso de los concentrados en función a la cantidad de cuyes y peso promedio de cada poza, ya sea en la etapa de crecimiento o engorde.</text:span></text:p>
              </text:list-item>
            </text:list>
            <text:p text:style-name="P102" loext:marker-style-name="T28"/>
            <text:list text:style-name="WWNum16">
              <text:list-item>
                <text:p text:style-name="P110" loext:marker-style-name="T28"><text:span text:style-name="T27">Articulación comercial</text:span><text:span text:style-name="T28">: La adquisición del Moto carga facilitará el transporte del producto (cuy) desde las unidades productivas (galpones) hacia al mercado objetivo (Recreos de los distritos de Puquio. <text:s/>Permitiéndose así atender las demandas del mercado objetivo, asimismo dicha herramienta permitirá el transporte adecuado del producto (a la fecha los productores transportan en servicios de terceros – moto taxi). Las adopciones tecnológicas antes detalladas permitirán reducir los costos de producción y por ende mejorar la competitividad del AEO.</text:span></text:p>
              </text:list-item>
            </text:list>
            <text:p text:style-name="P103" loext:marker-style-name="T28"/>
          </table:table-cell>
        </table:table-row>
      </table:table>
      <text:p text:style-name="P118" loext:marker-style-name="T41"/>
      <text:p text:style-name="P118" loext:marker-style-name="T41"/>
      <text:list text:continue-list="list23958279326208" text:style-name="WWNum5">
        <text:list-item>
          <text:list>
            <text:list-item>
              <text:p text:style-name="P60" loext:marker-style-name="T13"><text:span text:style-name="T13">PLAN DE VENTAS Y PRODUCCION: </text:span><text:span text:style-name="T13"/></text:p>
            </text:list-item>
          </text:list>
        </text:list-item>
      </text:list>
      <text:p text:style-name="P90" loext:marker-style-name="T19"><text:span text:style-name="T19">Determinar el plan de ventas, en base a la demanda objetivo y metas de venta, como consecuencia del análisis de la demanda insatisfecha, estructura de mercado, estrategia de marketing y capacidad operativa. El plan de ventas se proyectará durante el horizonte de evaluación planteado para la propuesta productiva.</text:span><text:span text:style-name="T19"/></text:p>
      <text:p text:style-name="P174" loext:marker-style-name="T19"/>
      <text:p text:style-name="P174" loext:marker-style-name="T19"/>
      <text:p text:style-name="P174" loext:marker-style-name="T19"/>
      <text:p text:style-name="P174" loext:marker-style-name="T19"><text:soft-page-break/></text:p>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94" loext:marker-style-name="T17"><text:span text:style-name="T17">Años</text:span><text:span text:style-name="T17"/></text:p>
          </table:table-cell>
          <table:table-cell table:style-name="Tabla24.B1" office:value-type="string">
            <text:p text:style-name="P94" loext:marker-style-name="T17"><text:span text:style-name="T17">Producción (unidad de medida)</text:span><text:span text:style-name="T17"/></text:p>
          </table:table-cell>
          <table:table-cell table:style-name="Tabla24.B1" office:value-type="string">
            <text:p text:style-name="P90" loext:marker-style-name="T17"><text:span text:style-name="T17">Precio por unidad de medida (S/.)</text:span><text:span text:style-name="T17"/></text:p>
          </table:table-cell>
          <table:table-cell table:style-name="Tabla24.B1" office:value-type="string">
            <text:p text:style-name="P94" loext:marker-style-name="T17"><text:span text:style-name="T17">Ventas proyectadas (S/.)</text:span><text:span text:style-name="T17"/></text:p>
          </table:table-cell>
        </table:table-row>
        <table:table-row table:style-name="Tabla24.2">
          <table:table-cell table:style-name="Tabla24.A2" office:value-type="string">
            <text:p text:style-name="P94" loext:marker-style-name="T35"><text:span text:style-name="T35">1</text:span><text:span text:style-name="T35"/></text:p>
          </table:table-cell>
          <table:table-cell table:style-name="Tabla24.B2" office:value-type="string">
            <text:p text:style-name="P125" loext:marker-style-name="T102"><text:span text:style-name="T102">3,186</text:span><text:span text:style-name="T102"/></text:p>
          </table:table-cell>
          <table:table-cell table:style-name="Tabla24.C2" office:value-type="string">
            <text:p text:style-name="P125" loext:marker-style-name="T102"><text:span text:style-name="T102">18.00</text:span><text:span text:style-name="T102"/></text:p>
          </table:table-cell>
          <table:table-cell table:style-name="Tabla24.C2" office:value-type="string">
            <text:p text:style-name="P125" loext:marker-style-name="T102"><text:span text:style-name="T102">57,342.68</text:span><text:span text:style-name="T102"/></text:p>
          </table:table-cell>
        </table:table-row>
        <table:table-row table:style-name="Tabla24.2">
          <table:table-cell table:style-name="Tabla24.A2" office:value-type="string">
            <text:p text:style-name="P94" loext:marker-style-name="T35"><text:span text:style-name="T35">2</text:span><text:span text:style-name="T35"/></text:p>
          </table:table-cell>
          <table:table-cell table:style-name="Tabla24.A2" office:value-type="string">
            <text:p text:style-name="P125" loext:marker-style-name="T102"><text:span text:style-name="T102">11,444</text:span><text:span text:style-name="T102"/></text:p>
          </table:table-cell>
          <table:table-cell table:style-name="Tabla24.C3" office:value-type="string">
            <text:p text:style-name="P125" loext:marker-style-name="T102"><text:span text:style-name="T102">18.00</text:span><text:span text:style-name="T102"/></text:p>
          </table:table-cell>
          <table:table-cell table:style-name="Tabla24.C3" office:value-type="string">
            <text:p text:style-name="P125" loext:marker-style-name="T102"><text:span text:style-name="T102">205,986.53</text:span><text:span text:style-name="T102"/></text:p>
          </table:table-cell>
        </table:table-row>
        <table:table-row table:style-name="Tabla24.2">
          <table:table-cell table:style-name="Tabla24.A2" office:value-type="string">
            <text:p text:style-name="P94" loext:marker-style-name="T35"><text:span text:style-name="T35">3</text:span><text:span text:style-name="T35"/></text:p>
          </table:table-cell>
          <table:table-cell table:style-name="Tabla24.A2" office:value-type="string">
            <text:p text:style-name="P125" loext:marker-style-name="T102"><text:span text:style-name="T102">11,444</text:span><text:span text:style-name="T102"/></text:p>
          </table:table-cell>
          <table:table-cell table:style-name="Tabla24.C3" office:value-type="string">
            <text:p text:style-name="P125" loext:marker-style-name="T102"><text:span text:style-name="T102">18.00</text:span><text:span text:style-name="T102"/></text:p>
          </table:table-cell>
          <table:table-cell table:style-name="Tabla24.C3" office:value-type="string">
            <text:p text:style-name="P125" loext:marker-style-name="T102"><text:span text:style-name="T102">205,986.53</text:span><text:span text:style-name="T102"/></text:p>
          </table:table-cell>
        </table:table-row>
        <table:table-row table:style-name="Tabla24.2">
          <table:table-cell table:style-name="Tabla24.A2" office:value-type="string">
            <text:p text:style-name="P94" loext:marker-style-name="T35"><text:span text:style-name="T35">4</text:span><text:span text:style-name="T35"/></text:p>
          </table:table-cell>
          <table:table-cell table:style-name="Tabla24.A2" office:value-type="string">
            <text:p text:style-name="P125" loext:marker-style-name="T102"><text:span text:style-name="T102">11,444</text:span><text:span text:style-name="T102"/></text:p>
          </table:table-cell>
          <table:table-cell table:style-name="Tabla24.C3" office:value-type="string">
            <text:p text:style-name="P125" loext:marker-style-name="T102"><text:span text:style-name="T102">18.00</text:span><text:span text:style-name="T102"/></text:p>
          </table:table-cell>
          <table:table-cell table:style-name="Tabla24.C3" office:value-type="string">
            <text:p text:style-name="P125" loext:marker-style-name="T102"><text:span text:style-name="T102">205,986.53</text:span><text:span text:style-name="T102"/></text:p>
          </table:table-cell>
        </table:table-row>
        <table:table-row table:style-name="Tabla24.2">
          <table:table-cell table:style-name="Tabla24.A2" office:value-type="string">
            <text:p text:style-name="P94" loext:marker-style-name="T35"><text:span text:style-name="T35">5</text:span><text:span text:style-name="T35"/></text:p>
          </table:table-cell>
          <table:table-cell table:style-name="Tabla24.A2" office:value-type="string">
            <text:p text:style-name="P125" loext:marker-style-name="T102"><text:span text:style-name="T102">11,444</text:span><text:span text:style-name="T102"/></text:p>
          </table:table-cell>
          <table:table-cell table:style-name="Tabla24.C3" office:value-type="string">
            <text:p text:style-name="P125" loext:marker-style-name="T102"><text:span text:style-name="T102">18.00</text:span><text:span text:style-name="T102"/></text:p>
          </table:table-cell>
          <table:table-cell table:style-name="Tabla24.C3" office:value-type="string">
            <text:p text:style-name="P125" loext:marker-style-name="T102"><text:span text:style-name="T102">205,986.53</text:span><text:span text:style-name="T102"/></text:p>
          </table:table-cell>
        </table:table-row>
      </table:table>
      <text:p text:style-name="P90" loext:marker-style-name="T19"><text:span text:style-name="T19">Nota: El formulador deberá analizar si se considera un incremento en la producción y/o precio y durante qué periodo.</text:span><text:span text:style-name="T19"/></text:p>
      <text:p text:style-name="P174" loext:marker-style-name="T19"/>
      <text:list text:continue-numbering="true" text:style-name="WWNum5">
        <text:list-item>
          <text:p text:style-name="P58" loext:marker-style-name="T13"><text:span text:style-name="T13">ESTUDIO FINANCIERO</text:span><text:span text:style-name="T13"/></text:p>
          <text:list>
            <text:list-item>
              <text:p text:style-name="P59" loext:marker-style-name="T13"><text:span text:style-name="T13">ESTIMACION DE LA INVERSION TOTAL: se deberá detallar de todos los bienes y servicios a ser financiado por el GR/GL y el AEO.</text:span><text:span text:style-name="T13"/></text:p>
            </text:list-item>
          </text:list>
        </text:list-item>
      </text:list>
      <text:p text:style-name="P118" loext:marker-style-name="T41"/>
      <text:p text:style-name="P118" loext:marker-style-name="T41"/>
      <text:p text:style-name="P90" loext:marker-style-name="T41"><draw:frame draw:style-name="fr3" draw:name="Imagen 3" text:anchor-type="as-char" svg:width="16.351cm" svg:height="23.918cm" draw:z-index="0"><draw:image xlink:href="Pictures/100137500000640300008EAD7D173906.emf" xlink:type="simple" xlink:show="embed" xlink:actuate="onLoad" draw:mime-type="image/x-emf"/><draw:image xlink:href="Pictures/10000001000002500000034C516FC52C.png" xlink:type="simple" xlink:show="embed" xlink:actuate="onLoad" draw:mime-type="image/png"/></draw:frame></text:p>
      <text:p text:style-name="P118" loext:marker-style-name="T41"/>
      <text:p text:style-name="P118" loext:marker-style-name="T41"/>
      <text:list text:continue-numbering="true" text:style-name="WWNum5">
        <text:list-item>
          <text:list>
            <text:list-item>
              <text:p text:style-name="P59" loext:marker-style-name="T13"><text:span text:style-name="T13">PRESUPUESTO DE EGRESOS: Se registrará los costos de producción del bien o servicio y los gastos de operación </text:span><text:span text:style-name="T13"/></text:p>
            </text:list-item>
          </text:list>
        </text:list-item>
      </text:list>
      <text:p text:style-name="P81" loext:marker-style-name="T13"/>
      <text:p text:style-name="P69" loext:marker-style-name="T13"><draw:frame draw:style-name="fr3" draw:name="Imagen 17" text:anchor-type="as-char" svg:width="15.716cm" svg:height="8.253cm" draw:z-index="0"><draw:image xlink:href="Pictures/10009F8C0000541300002550AF479BDD.emf" xlink:type="simple" xlink:show="embed" xlink:actuate="onLoad" draw:mime-type="image/x-emf"/><draw:image xlink:href="Pictures/100000010000032D000001699604FF7D.png" xlink:type="simple" xlink:show="embed" xlink:actuate="onLoad" draw:mime-type="image/png"/></draw:frame></text:p>
      <text:p text:style-name="P81" loext:marker-style-name="T13"/>
      <text:p text:style-name="P90" loext:marker-style-name="T41"><text:span text:style-name="T41">(*) </text:span><text:span text:style-name="T38">Nota</text:span><text:span text:style-name="T41">: Se considera Gastos Financieros siempre y cuando, con el plan de negocio se incurra en endeudamiento.</text:span></text:p>
      <text:p text:style-name="P118" loext:marker-style-name="T41"><text:soft-page-break/></text:p>
      <text:list text:continue-numbering="true" text:style-name="WWNum5">
        <text:list-item>
          <text:list>
            <text:list-item>
              <text:p text:style-name="P60" loext:marker-style-name="T13"><text:span text:style-name="T13">ESTADO DE RESULTADOS:</text:span><text:span text:style-name="T19"> Elaborar y presentar el estado de resultados o pérdidas y ganancias aplicando el principio de devengado, que implica que los gastos se registran cuando se constituye la obligación o derecho, no dependiendo si se efectiviza en el periodo de análisis. Realizar la proyección para el horizonte de evaluación planteado en la propuesta productiva.</text:span></text:p>
            </text:list-item>
          </text:list>
        </text:list-item>
      </text:list>
      <text:p text:style-name="P90" loext:marker-style-name="T13"><text:span text:style-name="T39">Nota:</text:span><text:span text:style-name="T13"> Si es con financiamiento, se llenarán los dos cuadros, sino solamente el primero (Estado de Resultados sin financiamiento)</text:span></text:p>
      <text:p text:style-name="P94" loext:marker-style-name="T43"><text:span text:style-name="T43">ESTADO DE RESULTADOS SIN FINANCIAMIENTO</text:span><text:span text:style-name="T43"/></text:p>
      <text:p text:style-name="P124" loext:marker-style-name="T18"/>
      <text:p text:style-name="P90" loext:marker-style-name="T18"><draw:frame draw:style-name="fr3" draw:name="Imagen 19" text:anchor-type="as-char" svg:width="16.245cm" svg:height="6.588cm" draw:z-index="0"><draw:image xlink:href="Pictures/10006F6400004DDE00001C3399EA311B.emf" xlink:type="simple" xlink:show="embed" xlink:actuate="onLoad" draw:mime-type="image/x-emf"/><draw:image xlink:href="Pictures/10000001000002F100000111EEF916BE.png" xlink:type="simple" xlink:show="embed" xlink:actuate="onLoad" draw:mime-type="image/png"/></draw:frame></text:p>
      <text:p text:style-name="P124" loext:marker-style-name="T18"/>
      <text:p text:style-name="P91" loext:marker-style-name="T41"><text:span text:style-name="T41"><text:s/>(*) Se deberá considerar el porcentaje de Impuesto a la renta determinado por la SUNAT, para el presente año.</text:span><text:span text:style-name="T41"/></text:p>
      <text:p text:style-name="P177" loext:marker-style-name="T43"/>
      <text:p text:style-name="P177" loext:marker-style-name="T43"/>
      <text:p text:style-name="P94" loext:marker-style-name="T43"><text:span text:style-name="T43">ESTADO DE RESULTADOS CON FINANCIAMIENTO</text:span><text:span text:style-name="T43"/></text:p>
      <text:p text:style-name="P91" loext:marker-style-name="T41"><draw:frame draw:style-name="fr3" draw:name="Imagen 21" text:anchor-type="as-char" svg:width="15.954cm" svg:height="8.334cm" draw:z-index="0"><draw:image xlink:href="Pictures/10009580000053F40000220894C0D6D5.emf" xlink:type="simple" xlink:show="embed" xlink:actuate="onLoad" draw:mime-type="image/x-emf"/><draw:image xlink:href="Pictures/100000010000032C00000149149420C6.png" xlink:type="simple" xlink:show="embed" xlink:actuate="onLoad" draw:mime-type="image/png"/></draw:frame></text:p>
      <text:p text:style-name="P91" loext:marker-style-name="T41"><text:span text:style-name="T41">(*) Se deberá considerar el porcentaje de Impuesto a la renta determinado por la SUNAT, para el presente año.</text:span><text:span text:style-name="T41"/></text:p>
      <text:p text:style-name="P91" loext:marker-style-name="T13"><text:span text:style-name="T36">Nota:</text:span><text:span text:style-name="T13"> Para efectos del flujo de caja económico, se utiliza el impuesto calculado en el estado de resultados sin financiamiento, toda vez que en el flujo de caja financiero se le agrega el escudo fiscal tributario</text:span></text:p>
      <text:p text:style-name="P123" loext:marker-style-name="T13"/>
      <text:list text:continue-numbering="true" text:style-name="WWNum5">
        <text:list-item>
          <text:list>
            <text:list-item>
              <text:p text:style-name="P60" loext:marker-style-name="T13"><text:span text:style-name="T13">FLUJO DE CAJA: Elaborar y presentar el flujo de caja como herramienta de evaluación, que muestre todos los ingresos y egresos, actuales y futuros, que tiene una propuesta productiva, que sirve para estimar la rentabilidad financiera. Realizar la proyección el horizonte de evaluación planteado para la propuesta productiva.</text:span><text:span text:style-name="T13"/></text:p>
            </text:list-item>
          </text:list>
        </text:list-item>
      </text:list>
      <text:p text:style-name="P178" loext:marker-style-name="T37"/>
      <text:p text:style-name="P91" loext:marker-style-name="T37"><draw:frame draw:style-name="fr3" draw:name="Imagen 22" text:anchor-type="as-char" svg:width="15.796cm" svg:height="8.546cm" draw:z-index="0"><draw:image xlink:href="Pictures/10008A4800005AA500002D17EC7B20F2.emf" xlink:type="simple" xlink:show="embed" xlink:actuate="onLoad" draw:mime-type="image/x-emf"/><draw:image xlink:href="Pictures/100000010000036D000001B479AF1D65.png" xlink:type="simple" xlink:show="embed" xlink:actuate="onLoad" draw:mime-type="image/png"/></draw:frame></text:p>
      <text:p text:style-name="P91" loext:marker-style-name="T106"><text:span text:style-name="T37">Nota:</text:span><text:span text:style-name="T106"> Las celdas sombreadas deben ser llenadas siempre y cuando una parte del monto total de inversión del proyecto sea financiada por una entidad financiera.</text:span></text:p>
      <table:table table:name="Tabla25" table:style-name="Tabla25">
        <table:table-column table:style-name="Tabla25.A"/>
        <table:table-column table:style-name="Tabla25.B"/>
        <table:table-row table:style-name="Tabla25.1">
          <table:table-cell table:style-name="Tabla25.A1" office:value-type="string">
            <text:p text:style-name="P90" loext:marker-style-name="T16"><text:span text:style-name="T16">COK</text:span><text:span text:style-name="T16"/></text:p>
          </table:table-cell>
          <table:table-cell table:style-name="Tabla25.A1" office:value-type="string">
            <text:p text:style-name="P94" loext:marker-style-name="T35"><text:span text:style-name="T35">20%</text:span><text:span text:style-name="T35"/></text:p>
          </table:table-cell>
        </table:table-row>
        <table:table-row table:style-name="Tabla25.1">
          <table:table-cell table:style-name="Tabla25.A1" office:value-type="string">
            <text:p text:style-name="P90" loext:marker-style-name="T16"><text:span text:style-name="T16">Tasa de descuento del préstamo (TEA)</text:span><text:span text:style-name="T16"/></text:p>
          </table:table-cell>
          <table:table-cell table:style-name="Tabla25.A1" office:value-type="string">
            <text:p text:style-name="P94" loext:marker-style-name="T35"><text:span text:style-name="T35">15%</text:span><text:span text:style-name="T35"/></text:p>
          </table:table-cell>
        </table:table-row>
      </table:table>
      <text:p text:style-name="P91" loext:marker-style-name="T106"><text:soft-page-break/><text:span text:style-name="T37">Nota:</text:span><text:span text:style-name="T106"> La TEA es la tasa efectiva anual del préstamo, es decir, tasa a la que te presta la entidad financiera y se utiliza siempre y cuando el plan de negocio sea con apalancamiento. <text:s/></text:span></text:p>
      <table:table table:name="Tabla26" table:style-name="Tabla26">
        <table:table-column table:style-name="Tabla26.A"/>
        <table:table-column table:style-name="Tabla26.B"/>
        <table:table-row table:style-name="Tabla26.1">
          <table:table-cell table:style-name="Tabla26.A1" office:value-type="string">
            <text:p text:style-name="P90" loext:marker-style-name="T16"><text:span text:style-name="T16">WACC</text:span><text:span text:style-name="T16"/></text:p>
          </table:table-cell>
          <table:table-cell table:style-name="Tabla26.A1" office:value-type="string">
            <text:p text:style-name="P94" loext:marker-style-name="T35"><text:span text:style-name="T35">19.67%</text:span><text:span text:style-name="T35"/></text:p>
          </table:table-cell>
        </table:table-row>
      </table:table>
      <text:p text:style-name="P91" loext:marker-style-name="T106"><text:span text:style-name="T37">Nota</text:span><text:span text:style-name="T106">: Se considera el cálculo del WACC siempre y cuando una parte del proyecto sea financiado con préstamo por una entidad financiera; caso contrario, se deberá hacer uso solo de la tasa de descuento del costo de oportunidad (COK). Considerar 20 % como máximo para el COK.</text:span></text:p>
      <table:table table:name="Tabla27" table:style-name="Tabla27">
        <table:table-column table:style-name="Tabla27.A"/>
        <table:table-column table:style-name="Tabla27.B"/>
        <table:table-row table:style-name="Tabla27.1">
          <table:table-cell table:style-name="Tabla27.A1" office:value-type="string">
            <text:p text:style-name="P90" loext:marker-style-name="T16"><text:span text:style-name="T16">VANE</text:span><text:span text:style-name="T16"/></text:p>
          </table:table-cell>
          <table:table-cell table:style-name="Tabla27.B1" office:value-type="string">
            <text:p text:style-name="P179" loext:marker-style-name="T103"><text:span text:style-name="T103">S/. 50,101.19</text:span><text:span text:style-name="T103"/></text:p>
          </table:table-cell>
        </table:table-row>
        <table:table-row table:style-name="Tabla27.1">
          <table:table-cell table:style-name="Tabla27.A1" office:value-type="string">
            <text:p text:style-name="P90" loext:marker-style-name="T16"><text:span text:style-name="T16">VANF</text:span><text:span text:style-name="T16"/></text:p>
          </table:table-cell>
          <table:table-cell table:style-name="Tabla27.B2" office:value-type="string">
            <text:p text:style-name="P179" loext:marker-style-name="T103"><text:span text:style-name="T103">S/. 48,801.01</text:span><text:span text:style-name="T103"/></text:p>
          </table:table-cell>
        </table:table-row>
        <table:table-row table:style-name="Tabla27.1">
          <table:table-cell table:style-name="Tabla27.A1" office:value-type="string">
            <text:p text:style-name="P90" loext:marker-style-name="T16"><text:span text:style-name="T16">TIRE</text:span><text:span text:style-name="T16"/></text:p>
          </table:table-cell>
          <table:table-cell table:style-name="Tabla27.B2" office:value-type="string">
            <text:p text:style-name="P179" loext:marker-style-name="T103"><text:span text:style-name="T103">30.26%</text:span><text:span text:style-name="T103"/></text:p>
          </table:table-cell>
        </table:table-row>
        <table:table-row table:style-name="Tabla27.1">
          <table:table-cell table:style-name="Tabla27.A1" office:value-type="string">
            <text:p text:style-name="P90" loext:marker-style-name="T16"><text:span text:style-name="T16">TIRF</text:span><text:span text:style-name="T16"/></text:p>
          </table:table-cell>
          <table:table-cell table:style-name="Tabla27.B2" office:value-type="string">
            <text:p text:style-name="P179" loext:marker-style-name="T103"><text:span text:style-name="T103">30.51%</text:span><text:span text:style-name="T103"/></text:p>
          </table:table-cell>
        </table:table-row>
      </table:table>
      <text:list text:continue-numbering="true" text:style-name="WWNum5">
        <text:list-item>
          <text:list>
            <text:list-item>
              <text:p text:style-name="P60" loext:marker-style-name="T13"><text:span text:style-name="T13">PUNTO DE EQUILIBRIO: Determinar el punto de equilibrio como aquella cantidad de productos que se necesitan vender para sostener el negocio, es decir, cubrir sus costos fijos y variables. Esta información proporciona información sobre la cantidad mínima que se debe producir y vender, para no presentar perdidas.</text:span><text:span text:style-name="T13"/></text:p>
            </text:list-item>
          </text:list>
        </text:list-item>
      </text:list>
      <text:h text:style-name="P56" text:outline-level="2" loext:marker-style-name="T101"><draw:frame draw:style-name="fr3" draw:name="Imagen 23" text:anchor-type="as-char" svg:width="15cm" svg:height="5.874cm" draw:z-index="0"><draw:image xlink:href="Pictures/100084A0000053F400001F1D87834C45.emf" xlink:type="simple" xlink:show="embed" xlink:actuate="onLoad" draw:mime-type="image/x-emf"/><draw:image xlink:href="Pictures/100000010000032C0000012DFB659817.png" xlink:type="simple" xlink:show="embed" xlink:actuate="onLoad" draw:mime-type="image/png"/></draw:frame></text:h>
      <text:p text:style-name="P120" loext:marker-style-name="T40"><draw:frame draw:style-name="fr4" draw:name="Imagen 24" text:anchor-type="char" svg:x="2.424cm" svg:y="0.4cm" svg:width="11.88cm" svg:height="9.153cm" draw:z-index="31"><draw:image xlink:href="Pictures/10000001000003260000026DFEB30525.png" xlink:type="simple" xlink:show="embed" xlink:actuate="onLoad" draw:mime-type="image/png"/></draw:frame></text:p>
      <text:p text:style-name="P121" loext:marker-style-name="T40"/>
      <text:p text:style-name="P121" loext:marker-style-name="T40"/>
      <text:p text:style-name="P121" loext:marker-style-name="T40"/>
      <text:p text:style-name="P121" loext:marker-style-name="T40"/>
      <text:p text:style-name="P121" loext:marker-style-name="T40"/>
      <text:p text:style-name="P121" loext:marker-style-name="T40"/>
      <text:p text:style-name="P121" loext:marker-style-name="T40"/>
      <text:p text:style-name="P121" loext:marker-style-name="T40"/>
      <text:p text:style-name="P121" loext:marker-style-name="T40"/>
      <text:p text:style-name="P121" loext:marker-style-name="T40"/>
      <text:p text:style-name="P90" loext:marker-style-name="T106"><text:span text:style-name="T37">Nota</text:span><text:span text:style-name="T41">: </text:span><text:span text:style-name="T106">El grafico de punto de equilibrio consignado en esta ficha es referencial, a modo de ejemplo. El consultor o formulador deberá colocar el grafico de punto de equilibrio correcto, en base a los datos obtenidos de ventas, costos totales acumulados y costos fijos.</text:span></text:p>
      <text:p text:style-name="P180" loext:marker-style-name="T106"><text:soft-page-break/></text:p>
      <text:list text:continue-numbering="true" text:style-name="WWNum5">
        <text:list-item>
          <text:p text:style-name="P58" loext:marker-style-name="T13"><text:span text:style-name="T13">CRONOGRAMA DE EJECUCIÓN</text:span><text:span text:style-name="T13"/></text:p>
          <text:list>
            <text:list-item>
              <text:p text:style-name="P59" loext:marker-style-name="T13"><text:span text:style-name="T13">CRONOGRAMA DE EJECUCIÓN FISICO</text:span><text:span text:style-name="T13"/></text:p>
            </text:list-item>
          </text:list>
        </text:list-item>
      </text:list>
      <text:p text:style-name="P118" loext:marker-style-name="T41"/>
      <text:p text:style-name="P90" loext:marker-style-name="T41"><draw:frame draw:style-name="fr3" draw:name="Imagen 25" text:anchor-type="as-char" svg:width="16.083cm" svg:height="6.985cm" draw:z-index="0"><draw:image xlink:href="Pictures/100036C4000054CE00001967F52D1832.emf" xlink:type="simple" xlink:show="embed" xlink:actuate="onLoad" draw:mime-type="image/x-emf"/><draw:image xlink:href="Pictures/1000000100000335000000F6F0CE8C53.png" xlink:type="simple" xlink:show="embed" xlink:actuate="onLoad" draw:mime-type="image/png"/></draw:frame></text:p>
      <text:p text:style-name="P118" loext:marker-style-name="T41"/>
      <text:p text:style-name="P90" loext:marker-style-name="T41"><text:span text:style-name="T41">Nota: Se recomienda consignar los componentes para cada partida</text:span><text:span text:style-name="T41"/></text:p>
      <text:p text:style-name="P118" loext:marker-style-name="T41"/>
      <text:list text:continue-numbering="true" text:style-name="WWNum5">
        <text:list-item>
          <text:list>
            <text:list-item>
              <text:p text:style-name="P59" loext:marker-style-name="T13"><text:span text:style-name="T13">CRONOGRAMA DE EJECUCIÓN FINANCIERO</text:span><text:span text:style-name="T13"/></text:p>
            </text:list-item>
          </text:list>
        </text:list-item>
      </text:list>
      <text:p text:style-name="P90" loext:marker-style-name="T41"><draw:frame draw:style-name="fr3" draw:name="Imagen 26" text:anchor-type="as-char" svg:width="16.081cm" svg:height="7.091cm" draw:z-index="0"><draw:image xlink:href="Pictures/10004B10000054CE00001BF5695ECEFB.emf" xlink:type="simple" xlink:show="embed" xlink:actuate="onLoad" draw:mime-type="image/x-emf"/><draw:image xlink:href="Pictures/10000001000003350000010F5A10FF48.png" xlink:type="simple" xlink:show="embed" xlink:actuate="onLoad" draw:mime-type="image/png"/></draw:frame></text:p>
      <text:p text:style-name="P118" loext:marker-style-name="T41"/>
      <text:p text:style-name="P118" loext:marker-style-name="T41"/>
      <text:p text:style-name="P118" loext:marker-style-name="T41"/>
      <text:p text:style-name="P118" loext:marker-style-name="T41"/>
      <text:p text:style-name="P118" loext:marker-style-name="T41"/>
      <text:p text:style-name="P118" loext:marker-style-name="T41"/>
      <text:p text:style-name="P118" loext:marker-style-name="T41"/>
      <text:p text:style-name="P118" loext:marker-style-name="T41"/>
      <text:p text:style-name="P118" loext:marker-style-name="T41"/>
      <text:p text:style-name="P118" loext:marker-style-name="T41"/>
      <text:list xml:id="list23960391631232" text:continue-numbering="true" text:style-name="WWNum5">
        <text:list-item>
          <text:list>
            <text:list-item>
              <text:p text:style-name="P60" loext:marker-style-name="T13"><text:span text:style-name="T13">ANALISIS DE SOSTENIBILIDAD: Especificar las medidas que se están adoptando para garantizar que la propuesta productiva generará los resultados previstos a lo largo de su vida útil.</text:span><text:span text:style-name="T13"/></text:p>
            </text:list-item>
          </text:list>
        </text:list-item>
      </text:list>
      <table:table table:name="Tabla28" table:style-name="Tabla28">
        <table:table-column table:style-name="Tabla28.A"/>
        <text:soft-page-break/>
        <table:table-row table:style-name="Tabla28.1">
          <table:table-cell table:style-name="Tabla28.A1" office:value-type="string">
            <text:p text:style-name="P181" loext:marker-style-name="T104"/>
            <text:list text:style-name="WWNum24">
              <text:list-item>
                <text:p text:style-name="P95" loext:marker-style-name="T31"><text:span text:style-name="T31">El AEO, es una organización sólida que viene trabajando hace dos años, cuyos socios tienen el compromiso de mantener la unidad y fortalecer la organización, quienes manifiestan que con la ejecución del Plan de negocio es una oportunidad para incursionar con mayor participación en el ámbito empresarial, lo que permitirá mejorar sus condiciones de vida.</text:span><text:span text:style-name="T31"/></text:p>
              </text:list-item>
            </text:list>
            <text:p text:style-name="P182" loext:marker-style-name="T31"/>
            <text:list text:style-name="WWNum23">
              <text:list-item>
                <text:p text:style-name="P96" loext:marker-style-name="T31"><text:span text:style-name="T31">La AEO, a través de su junta directiva han demostrado capacidad de gestión, para lo cual tiene el compromiso de continuar con la gestión a través de entidades del estado y agentes cooperantes que permita implementar mejora continua en todo el aparato productivo.</text:span><text:span text:style-name="T31"/></text:p>
              </text:list-item>
            </text:list>
            <text:p text:style-name="P182" loext:marker-style-name="T31"/>
            <text:list text:continue-numbering="true" text:style-name="WWNum23">
              <text:list-item>
                <text:p text:style-name="P96" loext:marker-style-name="T31"><text:span text:style-name="T31">El AEO, está en la capacidad de adaptarse a los cambios tecnológicos, es parte de la innovación quienes son conscientes que para ser más competitivos es necesario adaptarse a cambios tecnológicos y manejo de herramientas como las tecnologías de la información.</text:span><text:span text:style-name="T31"/></text:p>
              </text:list-item>
            </text:list>
            <text:p text:style-name="P182" loext:marker-style-name="T31"/>
            <text:list text:continue-numbering="true" text:style-name="WWNum23">
              <text:list-item>
                <text:p text:style-name="P96" loext:marker-style-name="T31"><text:span text:style-name="T31">El análisis económico financiero mostrado más arriba, sustenta la capacidad de generación de ingresos suficientes y oportunos para financiar las inversiones y gastos de operación de la cadena productiva de Cuy</text:span><text:span text:style-name="T31"/></text:p>
              </text:list-item>
            </text:list>
            <text:p text:style-name="P182" loext:marker-style-name="T31"/>
            <text:list text:continue-numbering="true" text:style-name="WWNum23">
              <text:list-item>
                <text:p text:style-name="P96" loext:marker-style-name="T31"><text:span text:style-name="T31">También la presente propuesta, se mantendrá sostenible a lo largo de cinco años de operación gracias a la provisión de materia prima bajo exclusividad por parte de cada socio del AEO, lapso en el cual y gradualmente, la producción de Cuy se incrementará por instalación de nuevas pozas para crianza y has de pastos.</text:span><text:span text:style-name="T31"/></text:p>
              </text:list-item>
            </text:list>
            <text:p text:style-name="P183" loext:marker-style-name="T107"/>
            <text:list text:style-name="WWNum25">
              <text:list-item>
                <text:p text:style-name="P97" loext:marker-style-name="T107"><text:span text:style-name="T41">El AEO cuenta con compromiso de Alianza estratégica para asistencia técnica con Agencia Agraria Puquio en manejo de crianza de cuyes y fortalecimiento de organización.</text:span><text:span text:style-name="T107"/></text:p>
              </text:list-item>
              <text:list-item>
                <text:p text:style-name="P97" loext:marker-style-name="T107"><text:span text:style-name="T41">El AEO cuenta con compromiso de Alianza estratégica para asistencia técnica en el manejo de pastos cultivados con AGRORURAL agencia Lucanas Puquio.</text:span><text:span text:style-name="T107"/></text:p>
              </text:list-item>
            </text:list>
            <text:p text:style-name="P184" loext:marker-style-name="T107"/>
            <text:list xml:id="list23958493337167" text:continue-numbering="true" text:style-name="WWNum25">
              <text:list-item>
                <text:p text:style-name="P97" loext:marker-style-name="T107"><text:span text:style-name="T107">compra venta de cuy con el mercado Regional Restaurant HATUN HUASI, Restaurand LA CABAÑA y BRITANIA S. Asimismo se tiene con mercado nacional Lima Restaurant PEÑA TURÍSTICO POCHO ubicado en San Juan de Miraflores</text:span><text:span text:style-name="T107"/></text:p>
              </text:list-item>
            </text:list>
            <text:p text:style-name="P183" loext:marker-style-name="T107"/>
          </table:table-cell>
        </table:table-row>
      </table:table>
      <text:p text:style-name="P118" loext:marker-style-name="T41"/>
      <text:p text:style-name="P118" loext:marker-style-name="T41"/>
      <text:list text:continue-list="list23960391631232" text:style-name="WWNum5">
        <text:list-item>
          <text:list>
            <text:list-item>
              <text:p text:style-name="P61" loext:marker-style-name="T13"><text:span text:style-name="T13">INDICADORES </text:span><text:span text:style-name="T13"/></text:p>
            </text:list-item>
          </text:list>
        </text:list-item>
      </text:list>
      <text:p text:style-name="P84" loext:marker-style-name="T13"/>
      <text:p text:style-name="Standard" loext:marker-style-name="T40"><draw:frame draw:style-name="fr3" draw:name="Imagen 27" text:anchor-type="as-char" svg:width="23.839cm" svg:height="12.197cm" draw:z-index="0"><draw:image xlink:href="Pictures/1000B1FC00006460000033C6F6900539.emf" xlink:type="simple" xlink:show="embed" xlink:actuate="onLoad" draw:mime-type="image/x-emf"/><draw:image xlink:href="Pictures/10000001000003CB000001F503236746.png" xlink:type="simple" xlink:show="embed" xlink:actuate="onLoad" draw:mime-type="image/png"/></draw:frame></text:p>
      <text:p text:style-name="P120" loext:marker-style-name="T40"/>
      <text:p text:style-name="P120" loext:marker-style-name="T40"/>
      <text:p text:style-name="P83" loext:marker-style-name="T13"/>
      <text:p text:style-name="P82" loext:marker-style-name="T13"/>
      <text:list xml:id="list23959596990945" text:continue-numbering="true" text:style-name="WWNum5">
        <text:list-item>
          <text:p text:style-name="P58" loext:marker-style-name="T13"><text:span text:style-name="T13">CONCLUSIONES</text:span><text:span text:style-name="T13"/></text:p>
        </text:list-item>
      </text:list>
      <text:p text:style-name="P82" loext:marker-style-name="T13"/>
      <text:list text:continue-list="list23958493337167" text:style-name="WWNum25">
        <text:list-item>
          <text:p text:style-name="P67" loext:marker-style-name="T32"><text:span text:style-name="T32">Existe demanda insatisfecha de carne de cuye; la cual está representada por los consumidores de los distritos de Puquio la misma que al primer año asciende a 27,141 unid.</text:span><text:span text:style-name="T109"> </text:span><text:span text:style-name="T32">y existe un contrato de compra venta de cuy con el mercado Regional </text:span><text:span text:style-name="T14">Restaurant HATUN HUASI, Restaurand LA CABAÑA y BRITANIA S. </text:span><text:span text:style-name="T32">Asimismo se tiene con mercado nacional Lima Restaurant </text:span><text:span text:style-name="T14">PEÑA TURÍSTICO POCHO</text:span><text:span text:style-name="T32"> ubicado en San Juan de Miraflores. <text:s text:c="2"/></text:span></text:p>
        </text:list-item>
      </text:list>
      <text:p text:style-name="P78" loext:marker-style-name="T32"/>
      <text:list text:continue-numbering="true" text:style-name="WWNum25">
        <text:list-item>
          <text:p text:style-name="P67" loext:marker-style-name="T32"><text:span text:style-name="T32">Con la implementación del plan de negocio se cubrirá la demanda insatisfecha en un 11.74% en el primer año y el 43.22% al quinto año.</text:span><text:span text:style-name="T32"/></text:p>
        </text:list-item>
      </text:list>
      <text:p text:style-name="P78" loext:marker-style-name="T32"/>
      <text:list text:continue-numbering="true" text:style-name="WWNum25">
        <text:list-item>
          <text:p text:style-name="P67" loext:marker-style-name="T32"><text:span text:style-name="T32">La implementación de la propuesta productiva, está basada en transferir tecnología con la finalidad de generar valor, ello se ve reflejado en los indicadores económicos favorables en beneficio de los socios, asimismo la propuesta es competitiva y contribuye al fortalecimiento de la cadena productiva de animales menores (cuy).</text:span><text:span text:style-name="T32"/></text:p>
        </text:list-item>
      </text:list>
      <text:p text:style-name="P78" loext:marker-style-name="T32"/>
      <text:list text:continue-numbering="true" text:style-name="WWNum25">
        <text:list-item>
          <text:p text:style-name="P67" loext:marker-style-name="T32"><text:span text:style-name="T32">Con la implementación de la propuesta productiva se incrementará el 100% el número de empleos de la asociación</text:span><text:span text:style-name="T32"/></text:p>
        </text:list-item>
      </text:list>
      <text:p text:style-name="P78" loext:marker-style-name="T32"/>
      <text:list text:continue-numbering="true" text:style-name="WWNum25">
        <text:list-item>
          <text:p text:style-name="P67" loext:marker-style-name="T32"><text:span text:style-name="T32">El AEO cuenta con un año de experiencia en la crianza y comercialización de forma asociativa</text:span><text:span text:style-name="T32"/></text:p>
        </text:list-item>
      </text:list>
      <text:p text:style-name="P78" loext:marker-style-name="T32"/>
      <text:list text:continue-numbering="true" text:style-name="WWNum25">
        <text:list-item>
          <text:p text:style-name="P67" loext:marker-style-name="T32"><text:span text:style-name="T32">El AEO cuenta con compromiso de Alianza estratégica para asistencia técnica CON AGENCIA AGRARIA PUQUIO en manejo de crianza de cuyes y fortalecimiento de organización.</text:span><text:span text:style-name="T32"/></text:p>
        </text:list-item>
      </text:list>
      <text:p text:style-name="P78" loext:marker-style-name="T32"/>
      <text:list text:continue-numbering="true" text:style-name="WWNum25">
        <text:list-item>
          <text:p text:style-name="P67" loext:marker-style-name="T32"><text:span text:style-name="T32">El AEO cuenta con compromiso de Alianza estratégica para asistencia técnica en el manejo de pastos cultivados con AGRORURAL agencia Lucanas Puquio.</text:span><text:span text:style-name="T32"/></text:p>
        </text:list-item>
      </text:list>
      <text:p text:style-name="P78" loext:marker-style-name="T32"/>
      <text:list text:continue-numbering="true" text:style-name="WWNum25">
        <text:list-item>
          <text:p text:style-name="P67" loext:marker-style-name="T32"><text:span text:style-name="T32">El AEO cuenta con compromiso de Alianza estratégica para asistencia técnica en sanidad Animal con AGROVETERINARIA SAN MARTIN Lucanas Puquio.</text:span><text:span text:style-name="T32"/></text:p>
        </text:list-item>
      </text:list>
      <text:p text:style-name="P78" loext:marker-style-name="T32"/>
      <text:list text:continue-numbering="true" text:style-name="WWNum25">
        <text:list-item>
          <text:p text:style-name="P67" loext:marker-style-name="T32"><text:span text:style-name="T32">El valor de la inversión total es de S/ 140,058.57soles, cuyo financiamiento está dado por el aporte del AEO por un monto de S/ 30,695.45 que representa el 21.92% y el cofinanciamiento del Gobierno Regional de Ayacucho a través de PROCOMPITE por un monto de S/ 109,363.12 soles que representa el 78.08%.</text:span><text:span text:style-name="T32"/></text:p>
        </text:list-item>
      </text:list>
      <text:p text:style-name="P78" loext:marker-style-name="T32"><text:soft-page-break/></text:p>
      <text:list text:continue-numbering="true" text:style-name="WWNum25">
        <text:list-item>
          <text:p text:style-name="P67" loext:marker-style-name="T32"><text:span text:style-name="T32">La AEO se tiene una organización sólida que contribuye eficazmente en fortalecer la cadena productiva, actualmente está constituida por 31 socios.</text:span><text:span text:style-name="T32"/></text:p>
        </text:list-item>
      </text:list>
      <text:p text:style-name="P115" loext:marker-style-name="T32"/>
      <text:list text:continue-numbering="true" text:style-name="WWNum25">
        <text:list-item>
          <text:p text:style-name="P67" loext:marker-style-name="T32"><text:span text:style-name="T32">Los indicadores económicos demuestran que el plan de negocio es rentable, siendo sus principales indicadores los siguientes: VANE=S/. 50,101.19, VANF=S/. 48,801.01, TIR=30.26% y TIRF=30.51%.</text:span><text:span text:style-name="T32"/></text:p>
        </text:list-item>
        <text:list-item>
          <text:p text:style-name="P67" loext:marker-style-name="T32"><text:span text:style-name="T32">De acuerdo a lo estudios la propuesta productiva es viable económica, social y ambientalmente</text:span><text:span text:style-name="T32"/></text:p>
        </text:list-item>
      </text:list>
      <text:p text:style-name="P82" loext:marker-style-name="T13"/>
      <text:p text:style-name="P82" loext:marker-style-name="T13"/>
      <text:p text:style-name="P82" loext:marker-style-name="T13"/>
      <text:p text:style-name="P82" loext:marker-style-name="T13"/>
      <text:p text:style-name="P82" loext:marker-style-name="T13"/>
      <text:p text:style-name="P82" loext:marker-style-name="T13"><text:bookmark text:name="_GoBack"/></text:p>
      <text:list text:continue-list="list23959596990945" text:style-name="WWNum5">
        <text:list-item>
          <text:p text:style-name="P58" loext:marker-style-name="T13"><text:span text:style-name="T13">RECOMENDACIONES</text:span><text:span text:style-name="T13"/></text:p>
        </text:list-item>
      </text:list>
      <text:p text:style-name="P122" loext:marker-style-name="T13"/>
      <text:p text:style-name="P105" loext:marker-style-name="T34"><text:span text:style-name="T34">Las recomendaciones de la propuesta productiva de la producción del cuy son las siguientes:</text:span><text:span text:style-name="T34"/></text:p>
      <text:list text:style-name="WWNum22">
        <text:list-item>
          <text:p text:style-name="P111" loext:marker-style-name="T34"><text:span text:style-name="T34">Se deberá aprovechar al máximo el apoyo del Programa PROCOMPITE para ser más competitivos en el mercado.</text:span><text:span text:style-name="T34"/></text:p>
        </text:list-item>
        <text:list-item>
          <text:p text:style-name="P111" loext:marker-style-name="T34"><text:span text:style-name="T34">La organización debe ser fortalecida con conocimientos de gestión y administración para la ejecución del Plan de Negocio.</text:span><text:span text:style-name="T34"/></text:p>
        </text:list-item>
        <text:list-item>
          <text:p text:style-name="P111" loext:marker-style-name="T34"><text:span text:style-name="T34">En términos de elegibilidad técnica, el plan de negocio cumple para ser aprobado, por lo que se recomienda su aprobación como parte de uno de los criterios de evaluación, para lo cual el comité deberá evaluar los criterios adicionales de elegibilidad cualitativa y criterio de selección.</text:span><text:span text:style-name="T34"/></text:p>
        </text:list-item>
        <text:list-item>
          <text:p text:style-name="P111" loext:marker-style-name="T34"><text:span text:style-name="T34">Se recomienda que después de su aprobación, se emita la respectiva resolución, aprobando el plan de negocio y posteriormente sea remitido a la OPMI para su registro en el aplicativo SI-PROCOMPITE y solicitar el código único para iniciar su ejecución.</text:span><text:span text:style-name="T34"/></text:p>
        </text:list-item>
        <text:list-item>
          <text:p text:style-name="P112" loext:marker-style-name="T34"><text:span text:style-name="T34">En la Ejecución aplicar plan de prevención y control de Covid -19 en el trabajo <text:s/></text:span><text:span text:style-name="T34"/></text:p>
        </text:list-item>
      </text:list>
      <text:p text:style-name="P116" loext:marker-style-name="T34"/>
      <text:p text:style-name="P119" loext:marker-style-name="T41"/>
      <text:p text:style-name="P119" loext:marker-style-name="T41"><text:soft-page-break/></text:p>
      <text:p text:style-name="P185" loext:marker-style-name="T41"><text:span text:style-name="T41"><text:tab/></text:span><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office:font-face-decls>
  <office:styles>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50%" fo:text-align="justify" style:justify-single-word="false"/>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line-height="100%"/>
      <style:text-properties fo:color="#4f81bd" loext:opacity="100%"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ítulo_20_5_20_C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ítulo_20_6_20_C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Título_20_9_20_C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ítulo_20_Car1"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loext:linked-style-name="Párrafo_20_de_20_lista_20_Car">
      <style:paragraph-properties fo:margin-left="1.27cm" fo:margin-top="0cm" fo:margin-bottom="0.353cm" style:contextual-spacing="true"/>
      <style:text-properties style:font-name-asian="Calibri1" style:font-family-asian="Calibri" style:font-family-generic-asian="system" style:font-pitch-asian="variable"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cm" style:contextual-spacing="false" fo:line-height="150%">
        <style:tab-stops>
          <style:tab-stop style:position="2.402cm"/>
          <style:tab-stop style:position="14.982cm" style:type="right"/>
        </style:tab-stops>
      </style:paragraph-properties>
      <style:text-properties fo:text-transform="uppercase" style:text-underline-style="solid" style:text-underline-width="auto" style:text-underline-color="font-color" fo:font-weight="bold" style:font-name-asian="Calibri1" style:font-family-asian="Calibri" style:font-family-generic-asian="system" style:font-pitch-asian="variable" style:language-asian="en" style:country-asian="US" style:font-weight-asian="bold" style:font-weight-complex="bold"/>
    </style:style>
    <style:style style:name="Contents_20_2" style:display-name="Contents 2" style:family="paragraph" style:parent-style-name="Standard" style:next-style-name="Standard" style:auto-update="true" style:class="index">
      <style:paragraph-properties fo:margin-top="0cm" fo:margin-bottom="0cm" style:contextual-spacing="false"/>
      <style:text-properties fo:font-variant="small-caps" fo:font-weight="bold" style:font-name-asian="Calibri1" style:font-family-asian="Calibri" style:font-family-generic-asian="system" style:font-pitch-asian="variable" style:language-asian="en" style:country-asian="US" style:font-weight-asian="bold" style:font-weight-complex="bold"/>
    </style:style>
    <style:style style:name="Contents_20_3" style:display-name="Contents 3" style:family="paragraph" style:parent-style-name="Standard" style:next-style-name="Standard" style:auto-update="true" style:class="index">
      <style:paragraph-properties fo:margin-top="0cm" fo:margin-bottom="0cm" style:contextual-spacing="false"/>
      <style:text-properties fo:font-variant="small-caps" style:font-name-asian="Calibri1" style:font-family-asian="Calibri" style:font-family-generic-asian="system" style:font-pitch-asian="variable" style:language-asian="en" style:country-asian="US"/>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name-asian="Calibri1" style:font-family-asian="Calibri" style:font-family-generic-asian="system" style:font-pitch-asian="variable" style:font-size-asian="10pt" style:language-asian="en" style:country-asian="US" style:font-size-complex="10pt"/>
    </style:style>
    <style:style style:name="Car" style:family="paragraph" style:parent-style-name="Standard">
      <style:paragraph-properties fo:margin-top="0.423cm" fo:margin-bottom="0.282cm" style:contextual-spacing="false" fo:line-height="0.423cm">
        <style:tab-stops>
          <style:tab-stop style:position="0.953cm"/>
          <style:tab-stop style:position="2.223cm"/>
          <style:tab-stop style:position="3.175cm"/>
        </style:tab-stops>
      </style:paragraph-properties>
      <style:text-properties style:font-name="Verdana" fo:font-family="Verdana" style:font-family-generic="roman"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language-asian="en" style:country-asian="US"/>
    </style:style>
    <style:style style:name="Contents_20_4" style:display-name="Contents 4"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5" style:display-name="Contents 5"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6" style:display-name="Contents 6"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7" style:display-name="Contents 7"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8" style:display-name="Contents 8"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9" style:display-name="Contents 9"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entury Gothic" fo:font-family="'Century Gothic'" style:font-family-generic="roman" fo:font-size="12pt" style:font-size-asian="12pt" style:font-name-complex="Century Gothic1" style:font-family-complex="'Century Gothic'" style:font-family-generic-complex="system" style:font-pitch-complex="variable" style:font-size-complex="12pt"/>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cm" fo:margin-bottom="0.529cm" style:contextual-spacing="false" style:line-height-at-least="0cm" fo:text-align="center"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exto_20_independiente4" style:display-name="Texto independiente4" style:family="paragraph" style:parent-style-name="Standard" loext:linked-style-name="Body_20_text_5f_">
      <loext:graphic-properties draw:fill="solid" draw:fill-color="#ffffff"/>
      <style:paragraph-properties fo:margin-top="0.529cm" fo:margin-bottom="0.318cm" style:contextual-spacing="false" fo:line-height="0.508cm" fo:text-align="justify"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Cuerpo_20_del_20_texto1" style:display-name="Cuerpo del texto1" style:family="paragraph" style:parent-style-name="Standard" loext:linked-style-name="Cuerpo_20_del_20_texto_5f_">
      <loext:graphic-properties draw:fill="solid" draw:fill-color="#ffffff"/>
      <style:paragraph-properties fo:margin-top="0.529cm" fo:margin-bottom="0.423cm" style:contextual-spacing="false" style:line-height-at-least="0.423cm" fo:orphans="0" fo:widows="0" fo:text-indent="-1.164cm" style:auto-text-indent="false" fo:background-color="#ffffff"/>
      <style:text-properties style:font-name="Arial Narrow" fo:font-family="'Arial Narrow'" style:font-family-generic="roman" fo:font-size="9.5pt" fo:font-weight="bold" style:font-size-asian="9.5pt" style:font-weight-asian="bold" style:font-name-complex="Arial Narrow1" style:font-family-complex="'Arial Narrow'" style:font-family-generic-complex="system" style:font-pitch-complex="variable" style:font-size-complex="9.5pt" style:font-weight-complex="bold"/>
    </style:style>
    <style:style style:name="Subtitle" style:family="paragraph" style:parent-style-name="Standard" loext:linked-style-name="Subtítulo_20_Car" style:class="chapter">
      <style:paragraph-properties fo:margin-top="0cm" fo:margin-bottom="0cm" style:contextual-spacing="false" fo:line-height="100%" fo:text-align="center" style:justify-single-word="false"/>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Sangría_20_3_20_de_20_t._20_independiente_20_Car">
      <style:paragraph-properties fo:margin-left="1.2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c__20_Indented" style:display-name="Body Text, Indented" style:family="paragraph" style:parent-style-name="Standard" loext:linked-style-name="Sangría_20_de_20_texto_20_normal_20_Car">
      <style:paragraph-properties fo:margin-left="0.7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2" style:display-name="Body Text 2" style:family="paragraph" style:parent-style-name="Standard" loext:linked-style-name="Texto_20_independiente_20_2_20_Car">
      <style:paragraph-properties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31" style:display-name="Body Text 31" style:family="paragraph" style:parent-style-name="Standard">
      <style:paragraph-properties fo:margin-top="0cm" fo:margin-bottom="0cm" style:contextual-spacing="false" fo:line-height="100%" fo:text-align="justify" style:justify-single-word="false" style:punctuation-wrap="hanging"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Body_20_Text_20_Indent_20_32" style:display-name="Body Text Indent 32" style:family="paragraph" style:parent-style-name="Standard">
      <style:paragraph-properties fo:margin-left="1.249cm" fo:margin-top="0cm" fo:margin-bottom="0cm" style:contextual-spacing="false" fo:line-height="100%" fo:text-align="justify" style:justify-single-word="false" style:punctuation-wrap="hanging"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_32_" style:display-name="2" style:family="paragraph" style:parent-style-name="Standard" style:next-style-name="Title" loext:linked-style-name="Título_20_Car">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1" style:display-name="Texto 1" style:family="paragraph" style:parent-style-name="Standard">
      <style:paragraph-properties fo:margin-top="0.212cm" fo:margin-bottom="0.106cm" style:contextual-spacing="false" fo:line-height="10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Texto_20_2" style:display-name="Texto 2" style:family="paragraph" style:parent-style-name="Texto_20_1">
      <style:paragraph-properties fo:margin-left="0.501cm"/>
    </style:style>
    <style:style style:name="Texto_20_4" style:display-name="Texto 4" style:family="paragraph" style:parent-style-name="Texto_20_3">
      <style:paragraph-properties fo:margin-left="2cm"/>
    </style:style>
    <style:style style:name="Texto_20_3" style:display-name="Texto 3" style:family="paragraph" style:parent-style-name="Texto_20_2">
      <style:paragraph-properties fo:margin-left="1.501cm"/>
    </style:style>
    <style:style style:name="Bullet_20_2" style:display-name="Bullet 2" style:family="paragraph" style:parent-style-name="Texto_20_2" style:next-style-name="Texto_20_2">
      <style:paragraph-properties fo:margin-left="1.771cm" fo:text-indent="-0.635cm" style:auto-text-indent="false">
        <style:tab-stops>
          <style:tab-stop style:position="1.771cm"/>
        </style:tab-stops>
      </style:paragraph-properties>
    </style:style>
    <style:style style:name="Bullet_20_3" style:display-name="Bullet 3" style:family="paragraph" style:parent-style-name="Texto_20_3" style:next-style-name="Texto_20_3">
      <style:paragraph-properties fo:margin-left="2.771cm" fo:text-indent="-0.635cm" style:auto-text-indent="false">
        <style:tab-stops>
          <style:tab-stop style:position="2.771cm"/>
        </style:tab-stops>
      </style:paragraph-properties>
    </style:style>
    <style:style style:name="Bullet_20_4" style:display-name="Bullet 4" style:family="paragraph" style:parent-style-name="Texto_20_4" style:next-style-name="Texto_20_4">
      <style:paragraph-properties fo:margin-left="3.27cm" fo:text-indent="-0.635cm" style:auto-text-indent="false">
        <style:tab-stops>
          <style:tab-stop style:position="3.27cm"/>
        </style:tab-stops>
      </style:paragraph-properties>
    </style:style>
    <style:style style:name="Bullet_20_1" style:display-name="Bullet 1" style:family="paragraph" style:parent-style-name="Texto_20_1" style:next-style-name="Texto_20_1" style:list-style-name="WWNum2"/>
    <style:style style:name="Body_20_Text_20_3" style:display-name="Body Text 3" style:family="paragraph" style:parent-style-name="Standard" loext:linked-style-name="Texto_20_independiente_20_3_20_Car">
      <style:paragraph-properties fo:margin-top="0cm" fo:margin-bottom="0.212cm" style:contextual-spacing="false" fo:line-height="100%"/>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 style:family="paragraph" style:parent-style-name="Standard">
      <style:paragraph-properties fo:margin-top="0.212cm" fo:margin-bottom="0cm" style:contextual-spacing="false" fo:line-height="100%" fo:text-align="justify" style:justify-single-word="false" style:punctuation-wrap="hanging" style:vertical-align="baseline"/>
      <style:text-properties style:font-name="Times" fo:font-family="Times" style:font-family-generic="roman"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vK" style:family="paragraph" style:parent-style-name="Standard">
      <style:paragraph-properties fo:margin-top="0cm" fo:margin-bottom="0cm" style:contextual-spacing="false" fo:line-height="100%" fo:text-align="justify" style:justify-single-word="false"/>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text-indent="0cm" style:auto-text-indent="false"/>
      <style:text-properties fo:color="#365f91" loext:opacity="100%" style:font-name="Cambria" fo:font-family="Cambria" style:font-family-generic="roman" style:font-name-asian="Times New Roman1" style:font-family-asian="'Times New Roman'" style:font-family-generic-asian="system" style:font-pitch-asian="variable" style:language-asian="es" style:country-asian="P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margin-top="0cm" fo:margin-bottom="0cm" style:contextual-spacing="false" fo:line-height="100%" fo:orphans="0" fo:widows="0"/>
      <style:text-properties style:font-name="Calibri" fo:font-family="Calibri" style:font-family-generic="roman" fo:language="en" fo:country="U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_31_" style:display-name="1" style:family="paragraph" style:parent-style-name="Standard" style:next-style-name="Title">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Titulo_20_2" style:display-name="Titulo 2" style:family="paragraph" style:parent-style-name="Heading_20_2" loext:linked-style-name="Titulo_20_2_20_Car" style:default-outline-level="2" style:list-style-name="">
      <style:paragraph-properties fo:margin-left="1.27cm" fo:margin-top="0.423cm" fo:margin-bottom="0.106cm" style:contextual-spacing="false" fo:line-height="100%" fo:keep-together="auto" fo:text-indent="-0.635cm" style:auto-text-indent="false">
        <style:tab-stops>
          <style:tab-stop style:position="1.251cm"/>
        </style:tab-stops>
      </style:paragraph-properties>
      <style:text-properties style:use-window-font-color="true" loext:opacity="0%" style:font-name="Arial Narrow" fo:font-family="'Arial Narrow'" style:font-family-generic="roman" fo:font-size="12pt" style:font-name-asian="Arial Unicode MS" style:font-family-asian="'Arial Unicode MS'" style:font-family-generic-asian="system" style:font-pitch-asian="variable" style:font-size-asian="12pt" style:language-asian="es" style:country-asian="PE"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Titul_20_3" style:display-name="Titul 3" style:family="paragraph" style:parent-style-name="Titulo_20_2">
      <style:paragraph-properties fo:margin-left="3.81cm" fo:text-indent="-0.318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loext:opacity="100%" style:font-name="Cambria" fo:font-family="Cambria"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4f81bd" loext:opacity="100%" style:font-name="Cambria" fo:font-family="Cambria"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Título_20_4_20_Car" style:display-name="Título 4 Car" style:family="text" style:parent-style-name="Default_20_Paragraph_20_Font">
      <style:text-properties fo:color="#4f81bd" loext:opacity="100%" style:font-name="Cambria" fo:font-family="Cambria"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Título_20_5_20_Car" style:display-name="Título 5 Car" style:family="text" style:parent-style-name="Default_20_Paragraph_20_Font">
      <style:text-properties fo:color="#243f60" loext:opacity="100%" style:font-name="Cambria" fo:font-family="Cambria"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Título_20_6_20_Car" style:display-name="Título 6 Car" style:family="text" style:parent-style-name="Default_20_Paragraph_20_Font">
      <style:text-properties fo:color="#243f6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style:text-properties fo:color="#40404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
      <style:text-properties fo:color="#404040" loext:opacity="100%" style:font-name="Cambria" fo:font-family="Cambria"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Título_20_9_20_Car" style:display-name="Título 9 Car" style:family="text" style:parent-style-name="Default_20_Paragraph_20_Font">
      <style:text-properties fo:color="#404040" loext:opacity="100%" style:font-name="Cambria" fo:font-family="Cambria"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ítulo_20_Car1" style:display-name="Título Car1" style:family="text" style:parent-style-name="Default_20_Paragraph_20_Font">
      <style:text-properties fo:color="#17365d" loext:opacity="100%" style:font-name="Cambria" fo:font-family="Cambria"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Párrafo_20_de_20_lista_20_Car" style:display-name="Párrafo de lista Car" style:family="text" loext:linked-style-name="List_20_Paragraph">
      <style:text-properties style:font-name-asian="Calibri1" style:font-family-asian="Calibri" style:font-family-generic-asian="system" style:font-pitch-asian="variable" style:language-asian="en" style:country-asian="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nota_20_pie_20_Car" style:display-name="Texto nota pie Car" style:family="text" style:parent-style-name="Default_20_Paragraph_20_Font">
      <style:text-properties fo:font-size="10pt" style:font-name-asian="Calibri1" style:font-family-asian="Calibri" style:font-family-generic-asian="system" style:font-pitch-asian="variable" style:font-size-asian="10pt" style:language-asian="en" style:country-asian="US"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Sin_20_espaciado_20_Car" style:display-name="Sin espaciado Car" style:family="text" style:parent-style-name="Default_20_Paragraph_20_Font" loext:linked-style-name="No_20_Spacing">
      <style:text-properties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Heading_20__23_2_5f_" style:display-name="Heading #2_" style:family="text" style:parent-style-name="Default_20_Paragraph_20_Font" loext:linked-style-name="Heading_20__23_2">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Body_20_text_5f_" style:display-name="Body text_" style:family="text" style:parent-style-name="Default_20_Paragraph_20_Font" loext:linked-style-name="Texto_20_independiente4">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_23_2_20__2b__20_Not_20_Bold" style:display-name="Heading #2 + Not Bold" style:family="text" style:parent-style-name="Heading_20__23_2_5f_">
      <style:text-properties style:font-name="Times New Roman" fo:font-family="'Times New Roman'" style:font-family-generic="roman" fo:font-size="10.5pt" fo:font-weight="bold" fo:background-color="#ffffff"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style:font-weight-complex="bold"/>
    </style:style>
    <style:style style:name="Body_20_text_20__2b__20_Bold" style:display-name="Body text + Bold" style:family="text" style:parent-style-name="Body_20_text_5f_">
      <style:text-properties fo:font-variant="normal" fo:text-transform="none" style:text-line-through-style="none" style:text-line-through-type="none" style:font-name="Times New Roman" fo:font-family="'Times New Roman'" style:font-family-generic="roman" fo:font-size="10.5pt" fo:letter-spacing="normal" fo:font-style="normal" fo:font-weight="bold" fo:background-color="#ffffff" style:font-name-asian="Times New Roman1" style:font-family-asian="'Times New Roman'" style:font-family-generic-asian="system" style:font-pitch-asian="variable" style:font-size-asian="10.5pt" style:font-style-asian="normal" style:font-weight-asian="bold" style:font-name-complex="Times New Roman1" style:font-family-complex="'Times New Roman'" style:font-family-generic-complex="system" style:font-pitch-complex="variable" style:font-size-complex="10.5pt" style:font-style-complex="normal" style:font-weight-complex="bold"/>
    </style:style>
    <style:style style:name="Cuerpo_20_del_20_texto_5f_" style:display-name="Cuerpo del texto_" style:family="text" loext:linked-style-name="Cuerpo_20_del_20_texto1">
      <style:text-properties style:font-name="Arial Narrow" fo:font-family="'Arial Narrow'" style:font-family-generic="roman" fo:font-size="9.5pt" fo:font-weight="bold" fo:background-color="#ffffff" style:font-size-asian="9.5pt" style:font-weight-asian="bold" style:font-name-complex="Arial Narrow1" style:font-family-complex="'Arial Narrow'" style:font-family-generic-complex="system" style:font-pitch-complex="variable" style:font-size-complex="9.5pt" style:font-weight-complex="bold"/>
    </style:style>
    <style:style style:name="apple-converted-space" style:family="text"/>
    <style:style style:name="Subtítulo_20_Car" style:display-name="Subtítulo Car" style:family="text" style:parent-style-name="Default_20_Paragraph_20_Font">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loext:linked-style-name="Body_20_Text_2c__20_Indented">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HTML_20_Typewriter" style:display-name="HTML Typewriter" style:family="text">
      <style:text-properties style:font-name="Courier New" fo:font-family="'Courier New'" style:font-family-generic="roman"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Page_20_Number1" style:display-name="Page Number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Título_20_Car" style:display-name="Título Car" style:family="text" loext:linked-style-name="_32_">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Sangría_20_2_20_de_20_t._20_independiente_20_Car" style:display-name="Sangría 2 de t. independiente Car" style:family="text" style:parent-style-name="Default_20_Paragraph_20_Font" loext:linked-style-name="Body_20_Text_20_Indent_20_2">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loext:linked-style-name="Body_20_Text_20_3">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Texto_20_nota_20_al_20_final_20_Car" style:display-name="Texto nota al final Car" style:family="text" style:parent-style-name="Default_20_Paragraph_20_Font">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st1" style:family="text" style:parent-style-name="Default_20_Paragraph_20_Font"/>
    <style:style style:name="Titulo_20_2_20_Car" style:display-name="Titulo 2 Car" style:family="text" loext:linked-style-name="Titulo_20_2">
      <style:text-properties style:font-name="Arial Narrow" fo:font-family="'Arial Narrow'" style:font-family-generic="roman" fo:font-size="12pt" fo:font-weight="bold" style:font-name-asian="Arial Unicode MS" style:font-family-asian="'Arial Unicode MS'"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style-complex="italic" style:font-weight-complex="bold"/>
    </style:style>
    <style:style style:name="ListLabel_20_1" style:display-name="ListLabel 1" style:family="text">
      <style:text-properties fo:font-size="12pt" style:font-size-asian="12pt"/>
    </style:style>
    <style:style style:name="ListLabel_20_2" style:display-name="ListLabel 2" style:family="text">
      <style:text-properties fo:color="#0070c0" loext:opacity="100%"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fo:font-weight="bold"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fo:font-size="10.5pt" fo:font-style="normal" fo:font-weight="normal" style:font-size-asian="10.5pt" style:font-style-asian="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pt" fo:font-weight="bold" style:font-size-asian="11pt"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asian="Arial Unicode MS" style:font-family-asian="'Arial Unicode MS'"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fo:font-weight="bold" style:font-name-asian="Arial Unicode MS" style:font-family-asian="'Arial Unicode MS'" style:font-family-generic-asian="system" style:font-pitch-asian="variable" style:font-weight-asian="bold" style:font-name-complex="Arial1" style:font-family-complex="Arial"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635cm" fo:margin-left="1.90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3.803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27cm" fo:margin-left="5.069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6.97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905cm" fo:margin-left="8.237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9.504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54cm" fo:margin-left="11.405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12.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1.191cm" fo:margin-left="2.461cm"/>
        </style:list-level-properties>
        <style:text-properties fo:font-family="Aria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714cm" fo:margin-left="2.619cm"/>
        </style:list-level-properties>
        <style:text-properties style:font-name="Wingding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_20_Spacing">
      <style:paragraph-properties fo:text-align="center" style:justify-single-word="false">
        <style:tab-stops>
          <style:tab-stop style:position="7.5cm" style:type="center"/>
        </style:tab-stops>
      </style:paragraph-properties>
    </style:style>
    <style:style style:name="MP2" style:family="paragraph" style:parent-style-name="No_20_Spacing">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style:font-name="Arial" fo:font-size="8pt" fo:font-style="italic" style:font-size-asian="8pt" style:font-style-asian="italic" style:font-name-complex="Arial1" style:font-size-complex="9pt"/>
    </style:style>
    <style:style style:name="MT1" style:family="text">
      <style:text-properties fo:font-size="10pt" style:font-size-asian="10pt"/>
    </style:style>
    <style:style style:name="MT2" style:family="text">
      <style:text-properties style:font-name="Arial" fo:font-size="8pt" fo:font-style="italic" style:font-size-asian="8pt" style:font-style-asian="italic" style:font-name-complex="Arial1" style:font-size-complex="9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1.251cm" fo:margin-bottom="1.251cm" fo:margin-left="2.501cm" fo:margin-right="2.501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n 20" text:anchor-type="char" svg:x="12.739cm" svg:y="-0.633cm" svg:width="1.459cm" svg:height="1.877cm" draw:z-index="11"><draw:image xlink:href="Pictures/1000000000000096000000C0C694528C.jpg" xlink:type="simple" xlink:show="embed" xlink:actuate="onLoad" draw:mime-type="image/jpeg"/><svg:desc>logo GR</svg:desc><draw:contour-polygon svg:width="1.671cm" svg:height="2.157cm" svg:viewBox="0 0 1671 2157" draw:points="25,0 25,2157 1696,2157 1696,0" draw:recreate-on-edit="false"/></draw:frame><draw:frame draw:style-name="Mfr2" draw:name="Imagen 1" text:anchor-type="char" svg:x="-0.381cm" svg:y="-0.501cm" svg:width="1.58cm" svg:height="1.732cm" draw:z-index="25"><draw:image xlink:href="Pictures/10000001000000490000005009A20BFF.png" xlink:type="simple" xlink:show="embed" xlink:actuate="onLoad" draw:mime-type="image/png"/></draw:frame><text:span text:style-name="MT1">GOBIERNO REGIONAL DE AYACUCHO</text:span><text:span text:style-name="MT1"/></text:p>
        <text:p text:style-name="MP2" loext:marker-style-name="MT1"><text:span text:style-name="MT1">GERENCIA REGIONAL DE DESARROLLO ECONÓMICO</text:span><text:span text:style-name="MT1"/></text:p>
        <text:p text:style-name="Header" loext:marker-style-name="MT2"><text:span text:style-name="MT2"><text:s text:c="46"/><text:tab/> “Año de la Universalización de la Salud”</text:span><text:span text:style-name="MT2"/></text:p>
      </style:header>
      <style:footer>
        <text:p text:style-name="MP3"><text:page-number text:select-page="current">12</text:page-number></text:p>
        <text:p text:style-name="Footer"/>
      </style:footer>
    </style:master-page>
    <style:master-page style:name="Converted1" style:page-layout-name="Mpm2" draw:style-name="Mdp1">
      <style:header>
        <text:p text:style-name="MP1" loext:marker-style-name="MT1"><draw:frame draw:style-name="Mfr1" draw:name="Imagen 20 Copia 1" text:anchor-type="char" svg:x="12.739cm" svg:y="-0.633cm" svg:width="1.459cm" svg:height="1.877cm" draw:z-index="35"><draw:image xlink:href="Pictures/1000000000000096000000C0C694528C.jpg" xlink:type="simple" xlink:show="embed" xlink:actuate="onLoad" draw:mime-type="image/jpeg"/><svg:desc>logo GR</svg:desc><draw:contour-polygon svg:width="1.671cm" svg:height="2.157cm" svg:viewBox="0 0 1671 2157" draw:points="25,0 25,2157 1696,2157 1696,0" draw:recreate-on-edit="false"/></draw:frame><draw:frame draw:style-name="Mfr2" draw:name="Imagen 1 Copia 1" text:anchor-type="char" svg:x="-0.381cm" svg:y="-0.501cm" svg:width="1.58cm" svg:height="1.732cm" draw:z-index="36"><draw:image xlink:href="Pictures/10000001000000490000005009A20BFF.png" xlink:type="simple" xlink:show="embed" xlink:actuate="onLoad" draw:mime-type="image/png"/></draw:frame><text:span text:style-name="MT1">GOBIERNO REGIONAL DE AYACUCHO</text:span></text:p>
        <text:p text:style-name="MP2" loext:marker-style-name="MT1"><text:span text:style-name="MT1">GERENCIA REGIONAL DE DESARROLLO ECONÓMICO</text:span></text:p>
        <text:p text:style-name="Header" loext:marker-style-name="MT2"><text:span text:style-name="MT2"><text:s text:c="46"/><text:tab/> “Año de la Universalización de la Salud”</text:span></text:p>
      </style:header>
      <style:footer>
        <text:p text:style-name="MP3"><text:page-number text:select-page="current">13</text:page-number></text:p>
        <text:p text:style-name="Footer"/>
      </style:footer>
    </style:master-page>
    <style:master-page style:name="Converted2" style:page-layout-name="Mpm3" draw:style-name="Mdp1">
      <style:header>
        <text:p text:style-name="MP1"><draw:frame draw:style-name="Mfr1" draw:name="Imagen 2" text:anchor-type="char" svg:x="0.598cm" svg:y="-0.746cm" svg:width="1.729cm" svg:height="2.223cm" draw:z-index="13"><draw:image xlink:href="Pictures/1000000000000096000000C0C694528C.jpg" xlink:type="simple" xlink:show="embed" xlink:actuate="onLoad" draw:mime-type="image/jpeg"/><svg:desc>logo GR</svg:desc><draw:contour-polygon svg:width="1.672cm" svg:height="2.197cm" svg:viewBox="0 0 1672 2197" draw:points="25,0 25,2197 1697,2197 1697,0" draw:recreate-on-edit="false"/></draw:frame>GOBIERNO REGIONAL DE AYACUCHO</text:p>
        <text:p text:style-name="MP2">GERENCIA REGIONAL DE DESARROLLO ECONÓMICO</text:p>
        <text:p text:style-name="MP4" loext:marker-style-name="MT2"><text:span text:style-name="MT2">“Año de la consolidación del Mar de Grau”</text:span><text:span text:style-name="MT2"/></text:p>
        <text:p text:style-name="MP5" loext:marker-style-name="MT2"/>
      </style:header>
      <style:header-first>
        <text:p text:style-name="MP1" loext:marker-style-name="MT1"><draw:frame draw:style-name="Mfr1" draw:name="Imagen 20 Copia 1 Copia 1" text:anchor-type="char" svg:x="12.739cm" svg:y="-0.633cm" svg:width="1.459cm" svg:height="1.877cm" draw:z-index="37"><draw:image xlink:href="Pictures/1000000000000096000000C0C694528C.jpg" xlink:type="simple" xlink:show="embed" xlink:actuate="onLoad" draw:mime-type="image/jpeg"/><svg:desc>logo GR</svg:desc><draw:contour-polygon svg:width="1.671cm" svg:height="2.157cm" svg:viewBox="0 0 1671 2157" draw:points="25,0 25,2157 1696,2157 1696,0" draw:recreate-on-edit="false"/></draw:frame><draw:frame draw:style-name="Mfr2" draw:name="Imagen 1 Copia 1 Copia 1" text:anchor-type="char" svg:x="-0.381cm" svg:y="-0.501cm" svg:width="1.58cm" svg:height="1.732cm" draw:z-index="38"><draw:image xlink:href="Pictures/10000001000000490000005009A20BFF.png" xlink:type="simple" xlink:show="embed" xlink:actuate="onLoad" draw:mime-type="image/png"/></draw:frame><text:span text:style-name="MT1">GOBIERNO REGIONAL DE AYACUCHO</text:span></text:p>
        <text:p text:style-name="MP2" loext:marker-style-name="MT1"><text:span text:style-name="MT1">GERENCIA REGIONAL DE DESARROLLO ECONÓMICO</text:span></text:p>
        <text:p text:style-name="Header" loext:marker-style-name="MT2"><text:span text:style-name="MT2"><text:s text:c="46"/><text:tab/> “Año de la Universalización de la Salud”</text:span></text:p>
      </style:header-first>
      <style:footer>
        <text:p text:style-name="MP3"><text:page-number text:select-page="current">16</text:page-number></text:p>
        <text:p text:style-name="Footer"/>
      </style:footer>
      <style:footer-first>
        <text:p text:style-name="MP3"><text:page-number text:select-page="current">14</text:page-number></text:p>
        <text:p text:style-name="Footer"/>
      </style:footer-first>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silva</meta:initial-creator>
    <dc:creator>User</dc:creator>
    <meta:editing-cycles>15</meta:editing-cycles>
    <meta:print-date>2020-09-12T08:17:00</meta:print-date>
    <meta:creation-date>2020-09-12T08:03:00</meta:creation-date>
    <dc:date>2020-09-12T16:13:00</dc:date>
    <meta:editing-duration>PT2H46M</meta:editing-duration>
    <meta:generator>LibreOffice/24.2.4.2$Linux_X86_64 LibreOffice_project/420$Build-2</meta:generator>
    <meta:document-statistic meta:table-count="28" meta:image-count="19" meta:object-count="0" meta:page-count="16" meta:paragraph-count="389" meta:word-count="5999" meta:character-count="38313" meta:non-whitespace-character-count="32446"/>
    <meta:user-defined meta:name="AppVersion">16.0000</meta:user-defined>
    <meta:user-defined meta:name="Company">MEF</meta:user-defined>
    <meta:template xlink:type="simple" xlink:actuate="onRequest" xlink:title="Normal" xlink:href=""/>
  </office:meta>
</office:document-meta>
</file>