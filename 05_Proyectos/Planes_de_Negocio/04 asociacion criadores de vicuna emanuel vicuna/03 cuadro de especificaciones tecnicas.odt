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252cm" fo:margin-left="1.199cm" fo:margin-top="0cm" fo:margin-bottom="0cm" table:align="left" style:writing-mode="page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2.268cm"/>
    </style:style>
    <style:style style:name="Tabla1.C" style:family="table-column">
      <style:table-column-properties style:column-width="9.253cm"/>
    </style:style>
    <style:style style:name="Tabla1.1" style:family="table-row">
      <style:table-row-properties style:min-row-height="0.811cm" fo:keep-together="auto"/>
    </style:style>
    <style:style style:name="Tabla1.A1" style:family="table-cell">
      <style:table-cell-properties style:vertical-align="middle" fo:background-color="#ffc00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a1.B2" style:family="table-cell">
      <style:table-cell-properties style:vertical-align="middle" fo:background-color="#00b0f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3" style:family="table-row">
      <style:table-row-properties style:min-row-height="0.503cm" fo:keep-together="auto"/>
    </style:style>
    <style:style style:name="Tabla1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C17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A1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1.B1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Tabla1.A1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1.B1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Tabla1.C19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P1" style:family="paragraph" style:parent-style-name="List_20_Paragraph">
      <style:paragraph-properties fo:margin-left="0cm" fo:line-height="115%" fo:text-align="start" style:justify-single-word="false"/>
    </style:style>
    <style:style style:name="P2" style:family="paragraph" style:parent-style-name="List_20_Paragraph" style:list-style-name="">
      <style:paragraph-properties fo:margin-left="0cm" fo:margin-top="0cm" fo:margin-bottom="0.106cm" style:contextual-spacing="true" fo:line-height="115%" fo:text-align="start" style:justify-single-word="false"/>
    </style:style>
    <style:style style:name="P3" style:family="paragraph" style:parent-style-name="List_20_Paragraph" style:list-style-name="">
      <style:paragraph-properties fo:margin-left="0cm" fo:line-height="115%" fo:text-align="start" style:justify-single-word="false"/>
    </style:style>
    <style:style style:name="P4" style:family="paragraph" style:parent-style-name="List_20_Paragraph" style:list-style-name="">
      <loext:graphic-properties draw:fill="solid" draw:fill-color="#ffffff"/>
      <style:paragraph-properties fo:margin-left="0cm" fo:line-height="115%" fo:text-align="start" style:justify-single-word="false" fo:background-color="#ffffff" style:vertical-align="baseline"/>
    </style:style>
    <style:style style:name="P5" style:family="paragraph" style:parent-style-name="List_20_Paragraph" style:list-style-name="">
      <style:paragraph-properties fo:margin-left="0cm" fo:line-height="115%"/>
    </style:style>
    <style:style style:name="P6" style:family="paragraph" style:parent-style-name="List_20_Paragraph">
      <style:paragraph-properties fo:margin-left="0cm" fo:line-height="115%">
        <style:tab-stops>
          <style:tab-stop style:position="-8.573cm"/>
        </style:tab-stops>
      </style:paragraph-properties>
    </style:style>
    <style:style style:name="P7" style:family="paragraph" style:parent-style-name="List_20_Paragraph" style:list-style-name="">
      <style:paragraph-properties fo:margin-left="0cm" fo:line-height="115%" fo:text-align="start" style:justify-single-word="false"/>
      <style:text-properties fo:font-size="10pt" fo:language="es" fo:country="PE" fo:background-color="#ffffff" style:font-size-asian="10pt" style:font-name-complex="Arial1" style:font-size-complex="10pt"/>
    </style:style>
    <style:style style:name="P8" style:family="paragraph" style:parent-style-name="List_20_Paragraph" style:list-style-name="">
      <style:paragraph-properties fo:margin-left="0cm" fo:line-height="115%" fo:text-align="start" style:justify-single-word="false"/>
      <style:text-properties fo:font-size="10pt" fo:language="es" fo:country="PE" style:font-size-asian="10pt" style:font-name-complex="Arial1" style:font-size-complex="10pt" style:font-style-complex="italic" style:font-weight-complex="bold"/>
    </style:style>
    <style:style style:name="P9" style:family="paragraph" style:parent-style-name="List_20_Paragraph">
      <style:paragraph-properties fo:margin-left="0cm" fo:line-height="115%" fo:text-align="start" style:justify-single-word="false"/>
      <style:text-properties fo:font-size="10pt" fo:language="es" fo:country="PE" style:font-size-asian="10pt" style:font-name-complex="Arial1" style:font-size-complex="10pt"/>
    </style:style>
    <style:style style:name="P10" style:family="paragraph" style:parent-style-name="Standard">
      <style:paragraph-properties fo:margin-left="0cm" fo:text-align="center" style:justify-single-word="false"/>
    </style:style>
    <style:style style:name="P11" style:family="paragraph" style:parent-style-name="Standard">
      <style:paragraph-properties fo:margin-left="0cm" fo:text-align="center" style:justify-single-word="false" fo:text-indent="0.355cm" style:auto-text-indent="false"/>
    </style:style>
    <style:style style:name="P12" style:family="paragraph" style:parent-style-name="Standard">
      <style:paragraph-properties fo:margin-left="0cm" fo:text-align="start" style:justify-single-word="false"/>
    </style:style>
    <style:style style:name="P13" style:family="paragraph" style:parent-style-name="Standard">
      <style:paragraph-properties fo:margin-left="0cm" fo:text-align="start" style:justify-single-word="false" fo:text-indent="0.355cm" style:auto-text-indent="false"/>
    </style:style>
    <style:style style:name="P14" style:family="paragraph" style:parent-style-name="Standard">
      <style:paragraph-properties fo:margin-left="0cm" fo:line-height="115%"/>
    </style:style>
    <style:style style:name="P15" style:family="paragraph" style:parent-style-name="Standard">
      <style:paragraph-properties fo:margin-left="0cm" fo:line-height="115%" fo:text-align="center" style:justify-single-word="false"/>
    </style:style>
    <style:style style:name="P16" style:family="paragraph" style:parent-style-name="Standard" style:list-style-name="">
      <style:paragraph-properties fo:margin-left="0cm" fo:margin-top="0.423cm" fo:margin-bottom="0.106cm" style:contextual-spacing="false" fo:line-height="115%"/>
    </style:style>
    <style:style style:name="P17" style:family="paragraph" style:parent-style-name="Standard" style:list-style-name="">
      <style:paragraph-properties fo:margin-left="0cm" fo:line-height="115%"/>
    </style:style>
    <style:style style:name="P18" style:family="paragraph" style:parent-style-name="Standard">
      <style:paragraph-properties fo:margin-left="0cm" fo:line-height="115%">
        <style:tab-stops>
          <style:tab-stop style:position="-8.573cm"/>
        </style:tab-stops>
      </style:paragraph-properties>
    </style:style>
    <style:style style:name="P19" style:family="paragraph" style:parent-style-name="Standard">
      <style:paragraph-properties fo:margin-left="0cm" fo:line-height="115%"/>
      <style:text-properties fo:font-size="10pt" fo:language="es" fo:country="PE" style:font-size-asian="10pt" style:language-asian="en" style:country-asian="US" style:font-name-complex="Arial1" style:font-size-complex="10pt"/>
    </style:style>
    <style:style style:name="P20" style:family="paragraph" style:parent-style-name="Standard">
      <style:paragraph-properties fo:margin-left="0cm"/>
      <style:text-properties fo:font-size="10pt" fo:language="es" fo:country="PE" style:font-size-asian="10pt" style:language-asian="en" style:country-asian="US" style:font-name-complex="Arial1" style:font-size-complex="10pt"/>
    </style:style>
    <style:style style:name="P21" style:family="paragraph" style:parent-style-name="Standard">
      <style:paragraph-properties fo:margin-left="0cm" fo:text-align="start" style:justify-single-word="false"/>
      <style:text-properties fo:font-size="10pt" fo:language="es" fo:country="PE" style:font-size-asian="10pt" style:language-asian="en" style:country-asian="US" style:font-name-complex="Arial1" style:font-size-complex="10pt"/>
    </style:style>
    <style:style style:name="P22" style:family="paragraph" style:parent-style-name="Standard">
      <style:paragraph-properties fo:margin-left="0cm" fo:text-align="center" style:justify-single-word="false"/>
      <style:text-properties fo:font-size="10pt" fo:language="es" fo:country="PE" style:font-size-asian="10pt" style:language-asian="en" style:country-asian="US" style:font-name-complex="Arial1" style:font-size-complex="10pt"/>
    </style:style>
    <style:style style:name="P23" style:family="paragraph" style:parent-style-name="Standard">
      <style:paragraph-properties fo:margin-left="0cm" fo:text-align="center" style:justify-single-word="false"/>
      <style:text-properties fo:font-size="10pt" fo:language="es" fo:country="PE" fo:font-weight="bold" style:font-size-asian="10pt" style:language-asian="en" style:country-asian="US" style:font-weight-asian="bold" style:font-name-complex="Arial1" style:font-size-complex="10pt"/>
    </style:style>
    <style:style style:name="P24" style:family="paragraph" style:parent-style-name="Standard">
      <style:paragraph-properties fo:margin-left="0cm"/>
      <style:text-properties fo:font-size="10pt" fo:language="es" fo:country="PE" fo:font-weight="bold" style:font-size-asian="10pt" style:language-asian="en" style:country-asian="US" style:font-weight-asian="bold" style:font-name-complex="Arial1" style:font-size-complex="10pt"/>
    </style:style>
    <style:style style:name="P25" style:family="paragraph" style:parent-style-name="Standard">
      <style:paragraph-properties fo:margin-left="0cm"/>
    </style:style>
    <style:style style:name="T1" style:family="text">
      <style:text-properties fo:font-size="16pt" fo:language="es" fo:country="PE" fo:font-weight="bold" style:font-size-asian="16pt" style:language-asian="en" style:country-asian="US" style:font-weight-asian="bold" style:font-name-complex="Arial1" style:font-size-complex="16pt" style:font-weight-complex="bold"/>
    </style:style>
    <style:style style:name="T2" style:family="text">
      <style:text-properties fo:font-size="10pt" fo:language="es" fo:country="PE" fo:font-weight="bold" style:font-size-asian="10pt" style:language-asian="en" style:country-asian="US" style:font-weight-asian="bold" style:font-name-complex="Arial1" style:font-size-complex="11pt" style:font-weight-complex="bold"/>
    </style:style>
    <style:style style:name="T3" style:family="text">
      <style:text-properties fo:font-size="10pt" fo:language="es" fo:country="PE" fo:font-weight="bold" style:font-size-asian="10pt" style:language-asian="en" style:country-asian="US" style:font-weight-asian="bold" style:font-name-complex="Arial1" style:font-size-complex="10pt"/>
    </style:style>
    <style:style style:name="T4" style:family="text">
      <style:text-properties fo:font-size="10pt" fo:language="es" fo:country="PE" fo:font-weight="bold" style:font-size-asian="10pt" style:font-weight-asian="bold" style:font-name-complex="Arial1" style:font-size-complex="10pt"/>
    </style:style>
    <style:style style:name="T5" style:family="text">
      <style:text-properties fo:font-size="10pt" fo:language="es" fo:country="PE" fo:font-weight="bold" style:font-size-asian="10pt" style:font-weight-asian="bold" style:font-name-complex="Arial1" style:font-size-complex="10pt" style:font-style-complex="italic" style:font-weight-complex="bold"/>
    </style:style>
    <style:style style:name="T6" style:family="text">
      <style:text-properties fo:font-size="10pt" fo:language="es" fo:country="PE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fo:font-size="10pt" fo:language="es" fo:country="PE" style:font-size-asian="10pt" style:language-asian="en" style:country-asian="US" style:font-name-complex="Arial1" style:font-size-complex="10pt"/>
    </style:style>
    <style:style style:name="T8" style:family="text">
      <style:text-properties fo:font-size="10pt" fo:language="es" fo:country="PE" style:font-size-asian="10pt" style:font-name-complex="Arial1" style:font-size-complex="10pt"/>
    </style:style>
    <style:style style:name="T9" style:family="text">
      <style:text-properties fo:font-size="10pt" fo:language="es" fo:country="PE" style:font-size-asian="10pt" style:font-name-complex="Arial1" style:font-size-complex="10pt" style:font-style-complex="italic" style:font-weight-complex="bold"/>
    </style:style>
    <style:style style:name="T10" style:family="text">
      <style:text-properties fo:font-size="10pt" fo:language="es" fo:country="PE" style:font-size-asian="10pt" style:font-name-complex="Arial1" style:font-size-complex="10pt" style:font-weight-complex="bold"/>
    </style:style>
    <style:style style:name="T11" style:family="text">
      <style:text-properties fo:font-size="10pt" fo:language="es" fo:country="PE" style:font-size-asian="10pt" style:font-name-complex="Arial1" style:font-size-complex="10pt" style:language-complex="en" style:country-complex="US" style:font-weight-complex="bold"/>
    </style:style>
    <style:style style:name="T12" style:family="text">
      <style:text-properties fo:font-size="10pt" fo:language="es" fo:country="PE" style:letter-kerning="true" style:font-size-asian="10pt" style:language-asian="es" style:country-asian="PE" style:font-name-complex="Arial1" style:font-size-complex="10pt" style:font-weight-complex="bold"/>
    </style:style>
    <style:style style:name="T13" style:family="text">
      <style:text-properties fo:font-size="10pt" fo:language="es" fo:country="PE" fo:background-color="#ffffff" loext:char-shading-value="0" style:font-size-asian="10pt" style:font-name-complex="Arial1" style:font-size-complex="10pt"/>
    </style:style>
    <style:style style:name="T14" style:family="text">
      <style:text-properties fo:color="#000000" loext:opacity="100%" fo:font-size="10pt" fo:language="es" fo:country="PE" style:font-size-asian="10pt" style:font-name-complex="Arial1" style:font-size-complex="10pt" style:font-weight-complex="bold"/>
    </style:style>
    <style:style style:name="T15" style:family="text">
      <style:text-properties fo:font-size="10pt" fo:language="es" fo:country="PE" fo:background-color="#ffffff" loext:char-shading-value="0" style:font-size-asian="10pt" style:font-name-complex="Arial1" style:font-size-complex="10pt" style:font-style-complex="italic" style:font-weight-complex="bold"/>
    </style:style>
    <style:style style:name="T16" style:family="text">
      <style:text-properties fo:font-size="10pt" fo:language="es" fo:country="PE" fo:font-weight="bold" fo:background-color="#ffffff" loext:char-shading-value="0" style:font-size-asian="10pt" style:font-weight-asian="bold" style:font-name-complex="Arial1" style:font-size-complex="10pt" style:font-style-complex="italic" style:font-weight-complex="bold"/>
    </style:style>
    <style:style style:name="T17" style:family="text">
      <style:text-properties fo:color="#000000" loext:opacity="100%" fo:font-size="10pt" fo:language="es" fo:country="PE" style:font-size-asian="10pt" style:font-name-complex="Arial1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0" loext:marker-style-name="T1"><text:span text:style-name="T1">CUADRO DE ESPECIFICACIONES TECNICAS.</text:span><text:span text:style-name="T1"/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0" loext:marker-style-name="T2"><text:span text:style-name="T2">REQUERIMIENTO</text:span><text:span text:style-name="T2"/></text:p>
          </table:table-cell>
          <table:table-cell table:style-name="Tabla1.B2" office:value-type="string">
            <text:p text:style-name="P10" loext:marker-style-name="T2"><text:span text:style-name="T2">CANTIDAD</text:span><text:span text:style-name="T2"/></text:p>
          </table:table-cell>
          <table:table-cell table:style-name="Tabla1.B2" office:value-type="string">
            <text:p text:style-name="P10" loext:marker-style-name="T2"><text:span text:style-name="T2">ESPECIFICACIÓN TECNICA</text:span><text:span text:style-name="T2"/></text:p>
          </table:table-cell>
        </table:table-row>
        <table:table-row table:style-name="Tabla1.3">
          <table:table-cell table:style-name="Tabla1.A3" office:value-type="string">
            <text:p text:style-name="P12" loext:marker-style-name="T3"><text:span text:style-name="T3">LAVADORA Y CENTRIFUGADORA 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8"><text:span text:style-name="T8">-Lavadora eléctrica de tambor con protección contra abatanado y agitador vertical.</text:span><text:span text:style-name="T8"/></text:p>
            <text:p text:style-name="P1" loext:marker-style-name="T8"><text:span text:style-name="T8">-Motor de 220V de 0.5 HP con centrifugadora (10Kg/hora).</text:span><text:span text:style-name="T8"/></text:p>
            <text:p text:style-name="P1" loext:marker-style-name="T8"><text:span text:style-name="T8">-conexión monofásica.</text:span><text:span text:style-name="T8"/></text:p>
            <text:p text:style-name="P14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2" loext:marker-style-name="T3"><text:span text:style-name="T3">PRENSA PARA ACABADO DE SOMBRERO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h text:style-name="P2" text:outline-level="5" loext:marker-style-name="T9"><text:span text:style-name="T9">-Estructura Fabricada de 10-20 con espesor de 10 mm.</text:span><text:span text:style-name="T9"/></text:h>
            <text:h text:style-name="P2" text:outline-level="5" loext:marker-style-name="T9"><text:span text:style-name="T9">-Oscilante de suspensión con rodamientos tipo ucf – 207. </text:span><text:span text:style-name="T9"/></text:h>
            <text:h text:style-name="P2" text:outline-level="5" loext:marker-style-name="T9"><text:span text:style-name="T9">-Soporte de sistema neumático en Aluminio rosca principal en acero 10-40 con. Apoyo en bronce.</text:span><text:span text:style-name="T9"/></text:h>
            <text:h text:style-name="P2" text:outline-level="5" loext:marker-style-name="T9"><text:span text:style-name="T9">-Rosca principal en acero 10-40con apoyo en bronce.</text:span><text:span text:style-name="T9"/></text:h>
            <text:h text:style-name="P2" text:outline-level="5" loext:marker-style-name="T9"><text:span text:style-name="T9">-El sistema de aire incluye manguera y llave.</text:span><text:span text:style-name="T9"/></text:h>
            <text:h text:style-name="P2" text:outline-level="5" loext:marker-style-name="T9"><text:span text:style-name="T9">-Quemador de gas en Hierro Fundido. </text:span><text:span text:style-name="T9"/></text:h>
            <text:h text:style-name="P2" text:outline-level="5" loext:marker-style-name="T9"><text:span text:style-name="T9">-Manivelas de gas en Hierro fundido.</text:span><text:span text:style-name="T9"/></text:h>
            <text:h text:style-name="P2" text:outline-level="5" loext:marker-style-name="T9"><text:span text:style-name="T9">-Eje principal de Acero 10-40 de 35 mm.</text:span><text:span text:style-name="T9"/></text:h>
            <text:h text:style-name="P3" text:outline-level="5" loext:marker-style-name="T9"><text:span text:style-name="T9">-Base de apoyo para Hormas en Hierro fundido. </text:span><text:span text:style-name="T9"/></text:h>
            <text:h text:style-name="P3" text:outline-level="5" loext:marker-style-name="T9"><text:span text:style-name="T9">-Capacidad promedio de producción 6 unidades hora.</text:span><text:span text:style-name="T9"/></text:h>
            <text:h text:style-name="P3" text:outline-level="5" loext:marker-style-name="T9"><text:span text:style-name="T9">-Peso 380 kgs aprox.</text:span><text:span text:style-name="T9"/></text:h>
            <text:h text:style-name="P3" text:outline-level="5" loext:marker-style-name="T9"><text:span text:style-name="T9">-Quemador con encendedor eléctrico.</text:span><text:span text:style-name="T9"/></text:h>
            <text:p text:style-name="P14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2" loext:marker-style-name="T3"><text:span text:style-name="T3">FIELTRADORA DE TAMBOR 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h text:style-name="P3" text:outline-level="5" loext:marker-style-name="T8"><text:span text:style-name="T8">-Estructura de aluminio </text:span><text:span text:style-name="T8"/></text:h>
            <text:h text:style-name="P3" text:outline-level="5" loext:marker-style-name="T8"><text:span text:style-name="T8">-Tambor de PVC reforzado</text:span><text:span text:style-name="T8"/></text:h>
            <text:h text:style-name="P3" text:outline-level="5" loext:marker-style-name="T8"><text:span text:style-name="T8">-Eje montado sobre rulemanes blindados </text:span><text:span text:style-name="T8"/></text:h>
            <text:h text:style-name="P3" text:outline-level="5" loext:marker-style-name="T8"><text:span text:style-name="T8">-Aletas impermeabilizadas (interior)</text:span><text:span text:style-name="T8"/></text:h>
            <text:h text:style-name="P3" text:outline-level="5" loext:marker-style-name="T8"><text:span text:style-name="T8">-Orificio de drenaje</text:span><text:span text:style-name="T8"/></text:h>
            <text:h text:style-name="P3" text:outline-level="5" loext:marker-style-name="T8"><text:span text:style-name="T8">-Bandeja colectora de fluidos.</text:span><text:span text:style-name="T8"/></text:h>
            <text:h text:style-name="P3" text:outline-level="5" loext:marker-style-name="T8"><text:span text:style-name="T8">-Motor de 220 V 60Hz Monofásico</text:span><text:span text:style-name="T8"/></text:h>
            <text:h text:style-name="P3" text:outline-level="5" loext:marker-style-name="T8"><text:span text:style-name="T8">-Regulador de velocidad</text:span><text:span text:style-name="T8"/></text:h>
            <text:h text:style-name="P3" text:outline-level="5" loext:marker-style-name="T8"><text:span text:style-name="T8">-Timmer mecánico con interruptor.</text:span><text:span text:style-name="T8"/></text:h>
            <text:h text:style-name="P3" text:outline-level="5" loext:marker-style-name="T8"><text:span text:style-name="T8">-Dimensiones: Largo: 1.80 mts, Alto: 0.55 mts, Profundidad: 49 cm, </text:span><text:span text:style-name="T8"/></text:h>
            <text:h text:style-name="P3" text:outline-level="5" loext:marker-style-name="T8"><text:span text:style-name="T8">-Tambor: Largo 140 cm, Diámetro 40 cm</text:span><text:span text:style-name="T8"/></text:h>
            <text:h text:style-name="P3" text:outline-level="5" loext:marker-style-name="T7"><text:span text:style-name="T8">-Peso: 100 kg. </text:span><text:span text:style-name="T7"> </text:span></text:h>
          </table:table-cell>
        </table:table-row>
        <table:table-row table:style-name="Tabla1.3">
          <table:table-cell table:style-name="Tabla1.A3" office:value-type="string">
            <text:p text:style-name="P13" loext:marker-style-name="T3"><text:span text:style-name="T3">MAQUINA RIBETEADORA 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h text:style-name="P3" text:outline-level="5" loext:marker-style-name="T9"><text:span text:style-name="T9">-Brazo de cañón, triple arrastre con brazo libre.</text:span><text:span text:style-name="T9"/></text:h>
            <text:h text:style-name="P3" text:outline-level="5" loext:marker-style-name="T9"><text:span text:style-name="T9">-Mueble de estructura metálica</text:span><text:span text:style-name="T9"/></text:h>
            <text:h text:style-name="P3" text:outline-level="5" loext:marker-style-name="T9"><text:span text:style-name="T9">-Motor ¾ HP 220 V 60HZ monofásico</text:span><text:span text:style-name="T9"/></text:h>
            <text:p text:style-name="P14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HORMAS DE ALUMINIO (MOLDES DE SOMBRERO)</text:span><text:span text:style-name="T3"/></text:p>
          </table:table-cell>
          <table:table-cell table:style-name="Tabla1.B3" office:value-type="string">
            <text:p text:style-name="P10" loext:marker-style-name="T7"><text:span text:style-name="T7">20</text:span><text:span text:style-name="T7"/></text:p>
          </table:table-cell>
          <table:table-cell table:style-name="Tabla1.B3" office:value-type="string">
            <text:p text:style-name="P1" loext:marker-style-name="T8"><text:span text:style-name="T8">-2x2=4 Unidades de Talla (S) circunferencia de la cabeza 54cm/55cm</text:span><text:span text:style-name="T8"/></text:p>
            <text:p text:style-name="P1" loext:marker-style-name="T8"><text:span text:style-name="T8">-2x2=4 Unidades de Talla (M) circunferencia de la cabeza 56cm/57cm.</text:span><text:span text:style-name="T8"/></text:p>
            <text:p text:style-name="P1" loext:marker-style-name="T8"><text:span text:style-name="T8">-2x2=4 Unidades de Talla (L) circunferencia de la cabeza 58cm/59cm.</text:span><text:span text:style-name="T8"/></text:p>
            <text:p text:style-name="P1" loext:marker-style-name="T8"><text:span text:style-name="T8">-2X2=4 Unidades de Talla (XL) circunferencia de la cabeza 60cm/61cm.</text:span><text:span text:style-name="T8"/></text:p>
            <text:p text:style-name="P1" loext:marker-style-name="T8"><text:span text:style-name="T8">-2X2=4 Unidades de Talla (2XL) circunferencia de la cabeza 62cm/63cm.</text:span><text:span text:style-name="T8"/></text:p>
            <text:p text:style-name="P14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MÁQUINA RECTA DE COSTURA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8"><text:span text:style-name="T8">-Máquina de costura recta extra pesada con puntada 7</text:span><text:span text:style-name="T8"/></text:p>
            <text:p text:style-name="P1" loext:marker-style-name="T8"><text:span text:style-name="T8">-Model <text:s/>191-d70 </text:span><text:span text:style-name="T8"/></text:p>
            <text:p text:style-name="P1" loext:marker-style-name="T8"><text:span text:style-name="T8">-Motor de 220 v, 60hz.</text:span><text:span text:style-name="T8"/></text:p>
            <text:p text:style-name="P1" loext:marker-style-name="T8"><text:span text:style-name="T8">-Conexión monofásica. </text:span><text:span text:style-name="T8"/></text:p>
            <text:p text:style-name="P1" loext:marker-style-name="T8"><text:span text:style-name="T8">-mueble y estructura metálica.</text:span><text:span text:style-name="T8"/></text:p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MÁQUINA REMALLADORA</text:span><text:span text:style-name="T3"/></text:p>
          </table:table-cell>
          <table:table-cell table:style-name="Tabla1.B3" office:value-type="string">
            <text:p text:style-name="P15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8"><text:span text:style-name="T7">-</text:span><text:span text:style-name="T8">Remalle Jeanera extra pesada 757KT-516-X3-56.</text:span></text:p>
            <text:p text:style-name="P1" loext:marker-style-name="T8"><text:span text:style-name="T8">-Doble arrastre regulable.</text:span><text:span text:style-name="T8"/></text:p>
            <text:p text:style-name="P1" loext:marker-style-name="T8"><text:span text:style-name="T8">-Lubricación Automática.</text:span><text:span text:style-name="T8"/></text:p>
            <text:p text:style-name="P1" loext:marker-style-name="T8"><text:span text:style-name="T8">-Motor Servo.</text:span><text:span text:style-name="T8"/></text:p>
            <text:p text:style-name="P19" loext:marker-style-name="T7"/>
          </table:table-cell>
        </table:table-row>
        <table:table-row table:style-name="Tabla1.3">
          <table:table-cell table:style-name="Tabla1.A3" office:value-type="string">
            <text:p text:style-name="P11" loext:marker-style-name="T3"><text:span text:style-name="T3">MESA DE ACERO INOX</text:span><text:span text:style-name="T3"/></text:p>
          </table:table-cell>
          <table:table-cell table:style-name="Tabla1.B3" office:value-type="string">
            <text:p text:style-name="P10" loext:marker-style-name="T7"><text:span text:style-name="T7">2</text:span><text:span text:style-name="T7"/></text:p>
          </table:table-cell>
          <table:table-cell table:style-name="Tabla1.B3" office:value-type="string">
            <text:p text:style-name="P1" loext:marker-style-name="T4"><text:span text:style-name="T8">-Mesa de trabajo en acero inox calidad 304</text:span><text:span text:style-name="T4"/></text:p>
            <text:p text:style-name="P1" loext:marker-style-name="T8"><text:span text:style-name="T8">-Plancha de espesor de 1/20 en acero inox. </text:span><text:span text:style-name="T8"/></text:p>
            <text:p text:style-name="P1" loext:marker-style-name="T8"><text:span text:style-name="T8">-Dimensiones de la mesa es de 100 cm de ancho, 220 cm de largo y 90 cm de alto. </text:span><text:span text:style-name="T8"/></text:p>
            <text:p text:style-name="P1" loext:marker-style-name="T4"><text:span text:style-name="T8">-Estructura tubular en acero inox calidad 304. </text:span><text:span text:style-name="T4"/></text:p>
            <text:p text:style-name="P1" loext:marker-style-name="T4"><text:span text:style-name="T8">-Sistema de soportes en “U”</text:span><text:span text:style-name="T4"/></text:p>
            <text:p text:style-name="P14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PLANCHADORA Y VAPORIZADORA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10"><text:span text:style-name="T10">-Potencia de motor de aspiración: </text:span><text:span text:style-name="T8">750W</text:span></text:p>
            <text:p text:style-name="P1" loext:marker-style-name="T8"><text:span text:style-name="T10">-Potencia calentamiento caldera</text:span><text:span text:style-name="T8">: 4.5kW</text:span></text:p>
            <text:p text:style-name="P1" loext:marker-style-name="T8"><text:span text:style-name="T10">-Potencia calefacción de mesa: </text:span><text:span text:style-name="T8">1000W</text:span></text:p>
            <text:p text:style-name="P1" loext:marker-style-name="T8"><text:span text:style-name="T10">-Potencia de calor</text:span><text:span text:style-name="T8">: 550W</text:span></text:p>
            <text:p text:style-name="P1" loext:marker-style-name="T8"><text:span text:style-name="T10">-Presión de vapor: </text:span><text:span text:style-name="T8">150Pa</text:span></text:p>
            <text:p text:style-name="P1" loext:marker-style-name="T10"><text:span text:style-name="T10">-Medida de MESA: </text:span><text:span text:style-name="T8">820x1500 mm</text:span></text:p>
            <text:p text:style-name="P1" loext:marker-style-name="T8"><text:span text:style-name="T10">-Tasa de evaporación nominal</text:span><text:span text:style-name="T8">: 6kg/h</text:span></text:p>
            <text:p text:style-name="P1" loext:marker-style-name="T8"><text:span text:style-name="T10">-Presión nominal de vapor</text:span><text:span text:style-name="T8">: 0.4MPa</text:span></text:p>
            <text:p text:style-name="P1" loext:marker-style-name="T10"><text:span text:style-name="T10">-Velocidad rotacional</text:span><text:span text:style-name="T8">: 2800r/min</text:span></text:p>
            <text:p text:style-name="P1" loext:marker-style-name="T8"><text:span text:style-name="T10">-Voltaje: </text:span><text:span text:style-name="T8">220V – 1HP/50HZ</text:span></text:p>
            <text:p text:style-name="P25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3" loext:marker-style-name="T3"><text:span text:style-name="T3">MÁQUINA DEVASTADORA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8"><text:span text:style-name="T7">-</text:span><text:span text:style-name="T8">Máquina de devastadora de sombrero</text:span></text:p>
            <text:p text:style-name="P1" loext:marker-style-name="T8"><text:span text:style-name="T8">-Estructura metálica</text:span><text:span text:style-name="T8"/></text:p>
            <text:p text:style-name="P1" loext:marker-style-name="T8"><text:span text:style-name="T8">-Motor 220v, 60hz. </text:span><text:span text:style-name="T8"/></text:p>
            <text:p text:style-name="P1" loext:marker-style-name="T8"><text:span text:style-name="T8">-Conexión monofásica.</text:span><text:span text:style-name="T8"/></text:p>
            <text:p text:style-name="P1" loext:marker-style-name="T8"><text:span text:style-name="T8">-Modelo yk-801.</text:span><text:span text:style-name="T8"/></text:p>
            <text:p text:style-name="P20" loext:marker-style-name="T7"/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MOLDE DE MANIQUÍ TALLADO DE MADERA Y PARCHERO DE ALUMINIO</text:span><text:span text:style-name="T3"/></text:p>
          </table:table-cell>
          <table:table-cell table:style-name="Tabla1.B3" office:value-type="string">
            <text:p text:style-name="P10" loext:marker-style-name="T7"><text:span text:style-name="T7">20</text:span><text:span text:style-name="T7"/></text:p>
          </table:table-cell>
          <table:table-cell table:style-name="Tabla1.B3" office:value-type="string">
            <text:p text:style-name="P14" loext:marker-style-name="T7"><text:span text:style-name="T7">-02 Unidades maniquí de madera talla S (55cm) altura 65 cm. Peso 3kl color madera</text:span><text:span text:style-name="T7"/></text:p>
            <text:p text:style-name="P14" loext:marker-style-name="T7"><text:span text:style-name="T7">-02 unidades maniquí de madera talla M (57cm) altura 65 cm. Peso 3.2Kl color canela <text:s text:c="9"/></text:span><text:span text:style-name="T7"/></text:p>
            <text:p text:style-name="P14" loext:marker-style-name="T7"><text:span text:style-name="T7">-02 unidades maniquí de madera talla L (59cm) altura 65 cm. peso 3.4KL color marrón oscuro.</text:span><text:span text:style-name="T7"/></text:p>
            <text:p text:style-name="P14" loext:marker-style-name="T7"><text:span text:style-name="T7">-02 unidades maniquí con pedestal de aluminio talla M (57cm) altura 1.20 M peso 6KL color canela.</text:span><text:span text:style-name="T7"/></text:p>
            <text:p text:style-name="P14" loext:marker-style-name="T7"><text:span text:style-name="T7">-02unidades de maniquí con pedestales de aluminio talla L (58-59cm) a altura 1.20m peso 6.2KL color canela.</text:span><text:span text:style-name="T7"/></text:p>
            <text:p text:style-name="P14" loext:marker-style-name="T7"><text:span text:style-name="T7">-04 unidades de perchero regulable (55cm) de circunferencia, altura (1.8mtrs) regulable a (1 mtrs), peso 4 kilos; color de perchero negro.</text:span><text:span text:style-name="T7"/></text:p>
            <text:p text:style-name="P14" loext:marker-style-name="T7"><text:span text:style-name="T7">-02 unidades unidades de perchero con ramales, (30 cm) cada brazo ramal, (55 cm) de circunferencia, altura de (2.10 mtrs), peso 8 kilos, color negro.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CAMARA <text:s/>FOTOGRÁFICA Y ACCESORIOS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4"><text:span text:style-name="T4">CAMARA FOTOGRAFICA:</text:span><text:span text:style-name="T4"/></text:p>
            <text:p text:style-name="P1" loext:marker-style-name="T8"><text:span text:style-name="T8">-CANON EOS 6D MARK II</text:span><text:span text:style-name="T8"/></text:p>
            <text:p text:style-name="P1" loext:marker-style-name="T8"><text:span text:style-name="T8">-LENTE 24-105mm STM USM.</text:span><text:span text:style-name="T8"/></text:p>
            <text:p text:style-name="P1" loext:marker-style-name="T8"><text:span text:style-name="T8">-Marca: Canon</text:span><text:span text:style-name="T8"/></text:p>
            <text:p text:style-name="P1" loext:marker-style-name="T8"><text:span text:style-name="T8">-Modelo: 6D Mark II Body</text:span><text:span text:style-name="T8"/></text:p>
            <text:p text:style-name="P1" loext:marker-style-name="T8"><text:span text:style-name="T8">-Megapíxeles: 20.2</text:span><text:span text:style-name="T8"/></text:p>
            <text:p text:style-name="P1" loext:marker-style-name="T8"><text:span text:style-name="T8">-Calidad de grabación: Full HD</text:span><text:span text:style-name="T8"/></text:p>
            <text:p text:style-name="P1" loext:marker-style-name="T8"><text:span text:style-name="T8">-Memoria expandible: Sí</text:span><text:span text:style-name="T8"/></text:p>
            <text:p text:style-name="P1" loext:marker-style-name="T8"><text:span text:style-name="T8">-Color: Negro</text:span><text:span text:style-name="T8"/></text:p>
            <text:p text:style-name="P1" loext:marker-style-name="T8"><text:span text:style-name="T8">-Velocidad del obturador: 1/4000</text:span><text:span text:style-name="T8"/></text:p>
            <text:p text:style-name="P1" loext:marker-style-name="T8"><text:span text:style-name="T8">-Tamaño de la pantalla: 3.0"</text:span><text:span text:style-name="T8"/></text:p>
            <text:p text:style-name="P1" loext:marker-style-name="T8"><text:span text:style-name="T8">-Formatos de imagen: JPEG/RAW</text:span><text:span text:style-name="T8"/></text:p>
            <text:p text:style-name="P1" loext:marker-style-name="T8"><text:span text:style-name="T8">-Sensibilidad ISO: 100-25600</text:span><text:span text:style-name="T8"/></text:p>
            <text:p text:style-name="P1" loext:marker-style-name="T8"><text:span text:style-name="T8">-Fuente de energía: Batería</text:span><text:span text:style-name="T8"/></text:p>
            <text:p text:style-name="P1" loext:marker-style-name="T8"><text:span text:style-name="T8">-Alto: 11 cm</text:span><text:span text:style-name="T8"/></text:p>
            <text:p text:style-name="P1" loext:marker-style-name="T8"><text:span text:style-name="T8">-Ancho: 14,4 cm</text:span><text:span text:style-name="T8"/></text:p>
            <text:p text:style-name="P1" loext:marker-style-name="T8"><text:span text:style-name="T8">-Profundidad: 7,1 cm</text:span><text:span text:style-name="T8"/></text:p>
            <text:p text:style-name="P1" loext:marker-style-name="T8"><text:span text:style-name="T8">-Peso: 755g</text:span><text:span text:style-name="T8"/></text:p>
            <text:p text:style-name="P14" loext:marker-style-name="T7"><text:span text:style-name="T7"> </text:span><text:span text:style-name="T7"/></text:p>
            <text:p text:style-name="P14" loext:marker-style-name="T3"><text:span text:style-name="T3">TRIPODE:</text:span><text:span text:style-name="T3"/></text:p>
            <text:h text:style-name="P4" text:outline-level="1" loext:marker-style-name="T12"><text:span text:style-name="T12">-Trípode Profesional Weifeng Wf-717 1.9m </text:span><text:span text:style-name="T12"/></text:h>
            <text:h text:style-name="P4" text:outline-level="1" loext:marker-style-name="T12"><text:span text:style-name="T12">-Peso de 7kg de aguante</text:span><text:span text:style-name="T12"/></text:h>
            <text:h text:style-name="P16" text:outline-level="5" loext:marker-style-name="T5"><text:span text:style-name="T5">LENTE CANON ZOOM LARGO:</text:span><text:span text:style-name="T5"/></text:h>
            <text:h text:style-name="P3" text:outline-level="5" loext:marker-style-name="T13"><text:span text:style-name="T13">-Marca canon</text:span><text:span text:style-name="T13"/></text:h>
            <text:h text:style-name="P3" text:outline-level="5" loext:marker-style-name="T13"><text:span text:style-name="T13">-Modelo: 75-300 mm</text:span><text:span text:style-name="T13"/></text:h>
            <text:h text:style-name="P3" text:outline-level="5" loext:marker-style-name="T9"><text:span text:style-name="T13">-Punto de enfoque: <text:s/>f/4-5.6 </text:span><text:span text:style-name="T15"/></text:h>
            <text:h text:style-name="P3" text:outline-level="5" loext:marker-style-name="T9"><text:span text:style-name="T13">-Tipo de producto: tele objetivo</text:span><text:span text:style-name="T15"/></text:h>
            <text:h text:style-name="P3" text:outline-level="5" loext:marker-style-name="T13"><text:span text:style-name="T13">-Compatible: con serie T y D de cámaras Canon</text:span><text:span text:style-name="T13"/></text:h>
            <text:h text:style-name="P7" text:outline-level="5" loext:marker-style-name="T13"/>
            <text:h text:style-name="P17" text:outline-level="5" loext:marker-style-name="T5"><text:span text:style-name="T5">FLASH REFLECTIVO:</text:span><text:span text:style-name="T5"/></text:h>
            <text:h text:style-name="P3" text:outline-level="5" loext:marker-style-name="T5"><text:span text:style-name="T13">-Marca: Sigma Light Type: Xenon.</text:span><text:span text:style-name="T16"/></text:h>
            <text:h text:style-name="P3" text:outline-level="5" loext:marker-style-name="T5"><text:span text:style-name="T13">-Características: Tilt, E-TTL, Wireless remoto control, Zoom, Swivel, Rear/Second</text:span><text:span text:style-name="T16"/></text:h>
            <text:h text:style-name="P3" text:outline-level="5" loext:marker-style-name="T5"><text:span text:style-name="T13">-Curtain Sync, AF Assist Light, TTL Manufacturer warranty: 1 year</text:span><text:span text:style-name="T16"/></text:h>
            <text:h text:style-name="P3" text:outline-level="5" loext:marker-style-name="T5"><text:span text:style-name="T13">-Marca compatible: Canon,sony, nikon Para encajar: Cámara</text:span><text:span text:style-name="T16"/></text:h>
            <text:h text:style-name="P3" text:outline-level="5" loext:marker-style-name="T13"><text:span text:style-name="T13">-Tipo: Montura tipo zapata Country/Region of Manufacture.</text:span><text:span text:style-name="T13"/></text:h>
            <text:h text:style-name="P7" text:outline-level="5" loext:marker-style-name="T13"/>
            <text:h text:style-name="P17" text:outline-level="5" loext:marker-style-name="T5"><text:span text:style-name="T5">MEMORIA SD 128GB FULL HD SANDISK:</text:span><text:span text:style-name="T5"/></text:h>
            <text:h text:style-name="P5" text:outline-level="5" loext:marker-style-name="T13"><text:span text:style-name="T13">-Almacena fotos y videos full HD.</text:span><text:span text:style-name="T13"/></text:h>
            <text:h text:style-name="P5" text:outline-level="5" loext:marker-style-name="T13"><text:span text:style-name="T13">-permite tomar fotografías y transferir archivos.</text:span><text:span text:style-name="T13"/></text:h>
            <text:h text:style-name="P5" text:outline-level="5" loext:marker-style-name="T5"><text:span text:style-name="T13">-Resistente al agua, temperaturas extremas, rayos X y golpes.</text:span><text:span text:style-name="T16"/></text:h>
            <text:h text:style-name="P3" text:outline-level="5" loext:marker-style-name="T5"><text:span text:style-name="T13"><text:s/></text:span><text:span text:style-name="T16"/></text:h>
            <text:h text:style-name="P17" text:outline-level="5" loext:marker-style-name="T5"><text:span text:style-name="T5">BATERIA EXTRA CANON LP E6N:</text:span><text:span text:style-name="T5"/></text:h>
            <text:h text:style-name="P5" text:outline-level="5" loext:marker-style-name="T13"><text:span text:style-name="T13">-Baterías de iones de litio EOS.</text:span><text:span text:style-name="T13"/></text:h>
            <text:h text:style-name="P5" text:outline-level="5" loext:marker-style-name="T13"><text:span text:style-name="T13">-Recargable con cargador LC-E6n o LC-E6E.</text:span><text:span text:style-name="T13"/></text:h>
            <text:h text:style-name="P8" text:outline-level="5" loext:marker-style-name="T9"/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BALANZA ANALÍTICA DIGITAL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8"><text:span text:style-name="T8">-Con celda de carga fuerte anti-agitación electromagnética monolítica.</text:span><text:span text:style-name="T8"/></text:p>
            <text:p text:style-name="P1" loext:marker-style-name="T8"><text:span text:style-name="T8">-Accesorios altamente integrados y fáciles de mantener.</text:span><text:span text:style-name="T8"/></text:p>
            <text:p text:style-name="P1" loext:marker-style-name="T8"><text:span text:style-name="T8">-Estándar de 1500V de aislamiento puerto USB con facilidad para conectar con el PC</text:span><text:span text:style-name="T8"/></text:p>
            <text:p text:style-name="P1" loext:marker-style-name="T8"><text:span text:style-name="T8">-Con filtro auto adaptivo, lograr u mejor equilibrio entre velocidad y precisión en diferentes circunstancias.</text:span><text:span text:style-name="T8"/></text:p>
            <text:p text:style-name="P1" loext:marker-style-name="T8"><text:span text:style-name="T8">-Función con trece unidades estándar.</text:span><text:span text:style-name="T8"/></text:p>
            <text:p text:style-name="P1" loext:marker-style-name="T8"><text:span text:style-name="T8">-Pesaje de calidad, recordando a los usuarios para calibrar después de los cambios del medio ambiente para lograr el mejor pesaje fiable.</text:span><text:span text:style-name="T8"/></text:p>
            <text:p text:style-name="P1" loext:marker-style-name="T8"><text:span text:style-name="T8">-Capacidad de seleccionar entre 110g a 420g.</text:span><text:span text:style-name="T8"/></text:p>
            <text:p text:style-name="P1" loext:marker-style-name="T8"><text:span text:style-name="T8">-Selecciona la precisión de 300,000 a 2, 100,000.</text:span><text:span text:style-name="T8"/></text:p>
            <text:p text:style-name="P1" loext:marker-style-name="T13"><text:span text:style-name="T8">-Calibración totalmente automática y rápida. </text:span><text:span text:style-name="T13"/></text:p>
            <text:p text:style-name="P25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0" loext:marker-style-name="T3"><text:span text:style-name="T3">MEDIDOR DE ESPESOR VERNIER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B3" office:value-type="string">
            <text:p text:style-name="P1" loext:marker-style-name="T8"><text:span text:style-name="T8">-VERNIER MITUTOYO DE 0 a 150mm / 6 Pulgadas</text:span><text:span text:style-name="T8"/></text:p>
            <text:p text:style-name="P1" loext:marker-style-name="T8"><text:span text:style-name="T8">-VERNIER MITUTOYO Rango de 0 a 300mm o 12 Pulgadas</text:span><text:span text:style-name="T8"/></text:p>
            <text:p text:style-name="P1" loext:marker-style-name="T8"><text:span text:style-name="T8">-Vernier Mitutoyo 500-196-20 Pantalla Digital LCD Material Acero Inoxidable</text:span><text:span text:style-name="T8"/></text:p>
            <text:p text:style-name="P1" loext:marker-style-name="T8"><text:span text:style-name="T8">-Precisión del producto: 0.01mm / 0.001" Caja/Estuche: Plástico ABS</text:span><text:span text:style-name="T8"/></text:p>
            <text:p text:style-name="P1" loext:marker-style-name="T8"><text:span text:style-name="T8">-1 Reinicio en cu</text:span><text:bookmark text:name="_GoBack"/><text:span text:style-name="T8">alquier posición</text:span><text:span text:style-name="T8"/></text:p>
            <text:p text:style-name="P1" loext:marker-style-name="T8"><text:span text:style-name="T8">-2 Conversión de 2 medidas métricas internacionales: Milímetros y Pulgadas.</text:span><text:span text:style-name="T8"/></text:p>
            <text:p text:style-name="P1" loext:marker-style-name="T8"><text:span text:style-name="T8">-3 Interruptor de encendido manual.</text:span><text:span text:style-name="T8"/></text:p>
            <text:p text:style-name="P25" loext:marker-style-name="T7"><text:span text:style-name="T7"> </text:span><text:span text:style-name="T7"/></text:p>
          </table:table-cell>
        </table:table-row>
        <table:table-row table:style-name="Tabla1.3">
          <table:table-cell table:style-name="Tabla1.A3" office:value-type="string">
            <text:p text:style-name="P12" loext:marker-style-name="T3"><text:span text:style-name="T3">IMPLEMENTACIÓN DE PÁGINA WEB Y COMERCIO ELECTRÓNICO</text:span><text:span text:style-name="T3"/></text:p>
          </table:table-cell>
          <table:table-cell table:style-name="Tabla1.B3" office:value-type="string">
            <text:p text:style-name="P10" loext:marker-style-name="T7"><text:span text:style-name="T7">1</text:span><text:span text:style-name="T7"/></text:p>
          </table:table-cell>
          <table:table-cell table:style-name="Tabla1.C17" office:value-type="string">
            <text:h text:style-name="P3" text:outline-level="5" loext:marker-style-name="T14"><text:span text:style-name="T7">-</text:span><text:span text:style-name="T14">Creación de página web e-commerce.</text:span></text:h>
            <text:h text:style-name="P3" text:outline-level="5" loext:marker-style-name="T14"><text:span text:style-name="T14">-Creación del plan estratégico integral – sistema de Conversión entrenamiento digital.</text:span><text:span text:style-name="T14"/></text:h>
            <text:h text:style-name="P3" text:outline-level="5" loext:marker-style-name="T14"><text:span text:style-name="T14">-Diseño web y de landing page (construyendo tú marca)</text:span><text:span text:style-name="T14"/></text:h>
            <text:h text:style-name="P3" text:outline-level="5" loext:marker-style-name="T14"><text:span text:style-name="T14">-Diseño email marketing</text:span><text:span text:style-name="T14"/></text:h>
            <text:h text:style-name="P3" text:outline-level="5" loext:marker-style-name="T14"><text:span text:style-name="T14">-Sitio Mobile responsivo para verse bien en teléfonos móviles.</text:span><text:span text:style-name="T14"/></text:h>
            <text:h text:style-name="P3" text:outline-level="5" loext:marker-style-name="T14"><text:span text:style-name="T14">-Botones sociales</text:span><text:span text:style-name="T14"/></text:h>
            <text:h text:style-name="P3" text:outline-level="5" loext:marker-style-name="T14"><text:span text:style-name="T14">-Galería de fotos.</text:span><text:span text:style-name="T14"/></text:h>
            <text:h text:style-name="P3" text:outline-level="5" loext:marker-style-name="T9"><text:span text:style-name="T14">-Formulario de contactos</text:span><text:span text:style-name="T17"/></text:h>
            <text:p text:style-name="P21" loext:marker-style-name="T7"/>
          </table:table-cell>
        </table:table-row>
        <table:table-row table:style-name="Tabla1.3">
          <table:table-cell table:style-name="Tabla1.A18" office:value-type="string">
            <text:p text:style-name="P23" loext:marker-style-name="T3"/>
          </table:table-cell>
          <table:table-cell table:style-name="Tabla1.B18" office:value-type="string">
            <text:p text:style-name="P22" loext:marker-style-name="T7"/>
          </table:table-cell>
          <table:table-cell table:style-name="Tabla1.B18" office:value-type="string">
            <text:p text:style-name="P20" loext:marker-style-name="T7"/>
          </table:table-cell>
        </table:table-row>
        <table:table-row table:style-name="Tabla1.3">
          <table:table-cell table:style-name="Tabla1.A19" office:value-type="string">
            <text:p text:style-name="P21" loext:marker-style-name="T7"/>
            <text:p text:style-name="P21" loext:marker-style-name="T7"/>
            <text:p text:style-name="P21" loext:marker-style-name="T7"/>
            <text:p text:style-name="P21" loext:marker-style-name="T7"/>
            <text:p text:style-name="P21" loext:marker-style-name="T7"/>
            <text:p text:style-name="P21" loext:marker-style-name="T7"/>
            <text:p text:style-name="P12" loext:marker-style-name="T3"><text:span text:style-name="T3">CAPACITACIÓN EN COMERCIO ELECTRÓNICO.</text:span><text:span text:style-name="T3"/></text:p>
          </table:table-cell>
          <table:table-cell table:style-name="Tabla1.B19" office:value-type="string">
            <text:p text:style-name="P21" loext:marker-style-name="T7"/>
            <text:p text:style-name="P21" loext:marker-style-name="T7"/>
            <text:p text:style-name="P22" loext:marker-style-name="T7"/>
            <text:p text:style-name="P22" loext:marker-style-name="T7"/>
            <text:p text:style-name="P22" loext:marker-style-name="T7"/>
            <text:p text:style-name="P22" loext:marker-style-name="T7"/>
            <text:p text:style-name="P10" loext:marker-style-name="T7"><text:span text:style-name="T7">3</text:span><text:span text:style-name="T7"/></text:p>
          </table:table-cell>
          <table:table-cell table:style-name="Tabla1.C19" office:value-type="string">
            <text:h text:style-name="P17" text:outline-level="5" loext:marker-style-name="T5"><text:span text:style-name="T5">PERFIL:</text:span><text:span text:style-name="T5"/></text:h>
            <text:p text:style-name="P6" loext:marker-style-name="T10"><text:span text:style-name="T10">-Experiencia no menor a de <text:s/>(02) años, en elaboración marketing digital.</text:span><text:span text:style-name="T10"/></text:p>
            <text:p text:style-name="P6" loext:marker-style-name="T10"><text:span text:style-name="T10">-Con formación académica de nivel superior y/o universitario.</text:span><text:span text:style-name="T10"/></text:p>
            <text:p text:style-name="P18" loext:marker-style-name="T6"><text:span text:style-name="T6">REQUISITOS:</text:span><text:span text:style-name="T6"/></text:p>
            <text:p text:style-name="P6" loext:marker-style-name="T10"><text:span text:style-name="T10">-Presentar currículo vitae </text:span><text:span text:style-name="T10"/></text:p>
            <text:p text:style-name="P6" loext:marker-style-name="T10"><text:span text:style-name="T10">-Estar habilitado para contratar con el Estado</text:span><text:span text:style-name="T10"/></text:p>
            <text:p text:style-name="P6" loext:marker-style-name="T10"><text:span text:style-name="T11">-Declaración jurada de no tener antecedentes Judiciales y Policiales</text:span><text:span text:style-name="T11"/></text:p>
            <text:p text:style-name="P6" loext:marker-style-name="T10"><text:span text:style-name="T11">-Disponibilidad de tiempo inmediata. </text:span><text:span text:style-name="T11"/></text:p>
            <text:p text:style-name="P21" loext:marker-style-name="T7"/>
          </table:table-cell>
        </table:table-row>
        <table:table-row table:style-name="Tabla1.3">
          <table:table-cell table:style-name="Tabla1.A3" office:value-type="string">
            <text:p text:style-name="P24" loext:marker-style-name="T3"/>
          </table:table-cell>
          <table:table-cell table:style-name="Tabla1.B3" office:value-type="string">
            <text:p text:style-name="P22" loext:marker-style-name="T7"/>
          </table:table-cell>
          <table:table-cell table:style-name="Tabla1.B3" office:value-type="string">
            <text:p text:style-name="P9" loext:marker-style-name="T8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fo:font-size="9pt" fo:language="es" fo:country="ES" style:font-name-asian="Times New Roman1" style:font-family-asian="'Times New Roman'" style:font-family-generic-asian="system" style:font-pitch-asian="variable" style:font-size-asian="9pt" style:language-asian="es" style:country-asian="ES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ll name</meta:initial-creator>
    <dc:creator>Full name</dc:creator>
    <meta:editing-cycles>2</meta:editing-cycles>
    <meta:print-date>2020-09-14T20:01:00</meta:print-date>
    <meta:creation-date>2020-09-14T14:30:00</meta:creation-date>
    <dc:date>2020-09-14T20:02:00</dc:date>
    <meta:editing-duration>PT5M</meta:editing-duration>
    <meta:generator>LibreOffice/24.2.4.2$Linux_X86_64 LibreOffice_project/420$Build-2</meta:generator>
    <meta:document-statistic meta:table-count="1" meta:image-count="0" meta:object-count="0" meta:page-count="2" meta:paragraph-count="189" meta:word-count="1011" meta:character-count="6653" meta:non-whitespace-character-count="5772"/>
    <meta:user-defined meta:name="AppVersion">15.0000</meta:user-defined>
    <meta:user-defined meta:name="Company">company</meta:user-defined>
    <meta:template xlink:type="simple" xlink:actuate="onRequest" xlink:title="Normal" xlink:href=""/>
  </office:meta>
</office:document-meta>
</file>