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Georgia" svg:font-family="Georgia" style:font-family-generic="roman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Tabla1" style:family="table">
      <style:table-properties style:width="14.982cm" fo:margin-left="0.009cm" fo:margin-top="0cm" fo:margin-bottom="0cm" table:align="left" style:writing-mode="page"/>
    </style:style>
    <style:style style:name="Tabla1.A" style:family="table-column">
      <style:table-column-properties style:column-width="5.902cm"/>
    </style:style>
    <style:style style:name="Tabla1.B" style:family="table-column">
      <style:table-column-properties style:column-width="9.079cm"/>
    </style:style>
    <style:style style:name="Tabla1.1" style:family="table-row">
      <style:table-row-properties style:min-row-height="0.388cm" fo:keep-together="auto"/>
    </style:style>
    <style:style style:name="Tabla1.A1" style:family="table-cell">
      <style:table-cell-properties style:vertical-align="middle" fo:background-color="#c00000" fo:padding-left="0.123cm" fo:padding-right="0.123cm" fo:padding-top="0.176cm" fo:padding-bottom="0.176cm" fo:border="0.5pt solid #000000">
        <style:background-image/>
      </style:table-cell-properties>
    </style:style>
    <style:style style:name="Tabla1.B1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.2" style:family="table-row">
      <style:table-row-properties style:min-row-height="0.847cm" fo:keep-together="auto"/>
    </style:style>
    <style:style style:name="Tabla1.B2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.3" style:family="table-row">
      <style:table-row-properties style:min-row-height="0.423cm" fo:keep-together="auto"/>
    </style:style>
    <style:style style:name="Tabla1.B3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.B4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.B5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.B6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.B7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.B8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.B9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.B10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.B11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2" style:family="table">
      <style:table-properties style:width="14.982cm" fo:margin-left="0.009cm" fo:margin-top="0cm" fo:margin-bottom="0cm" table:align="left" style:writing-mode="page"/>
    </style:style>
    <style:style style:name="Tabla2.A" style:family="table-column">
      <style:table-column-properties style:column-width="14.982cm"/>
    </style:style>
    <style:style style:name="Tabla2.1" style:family="table-row">
      <style:table-row-properties style:min-row-height="0.494cm" fo:keep-together="auto"/>
    </style:style>
    <style:style style:name="Tabla2.A1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3" style:family="table">
      <style:table-properties style:width="14.982cm" fo:margin-left="0.009cm" fo:margin-top="0cm" fo:margin-bottom="0cm" table:align="left" style:writing-mode="page"/>
    </style:style>
    <style:style style:name="Tabla3.A" style:family="table-column">
      <style:table-column-properties style:column-width="10.744cm"/>
    </style:style>
    <style:style style:name="Tabla3.B" style:family="table-column">
      <style:table-column-properties style:column-width="4.237cm"/>
    </style:style>
    <style:style style:name="Tabla3.1" style:family="table-row">
      <style:table-row-properties style:min-row-height="0.423cm" fo:keep-together="auto"/>
    </style:style>
    <style:style style:name="Tabla3.A1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3.3" style:family="table-row">
      <style:table-row-properties style:min-row-height="0.847cm" fo:keep-together="auto"/>
    </style:style>
    <style:style style:name="Tabla4" style:family="table">
      <style:table-properties style:width="14.446cm" fo:margin-left="0.009cm" fo:margin-top="0cm" fo:margin-bottom="0cm" table:align="left" style:writing-mode="page"/>
    </style:style>
    <style:style style:name="Tabla4.A" style:family="table-column">
      <style:table-column-properties style:column-width="8.754cm"/>
    </style:style>
    <style:style style:name="Tabla4.B" style:family="table-column">
      <style:table-column-properties style:column-width="5.69cm"/>
    </style:style>
    <style:style style:name="Tabla4.1" style:family="table-row">
      <style:table-row-properties style:min-row-height="0.423cm" fo:keep-together="auto"/>
    </style:style>
    <style:style style:name="Tabla4.A1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5" style:family="table">
      <style:table-properties style:width="14.982cm" fo:margin-left="0.009cm" fo:margin-top="0cm" fo:margin-bottom="0cm" table:align="left" style:writing-mode="page"/>
    </style:style>
    <style:style style:name="Tabla5.A" style:family="table-column">
      <style:table-column-properties style:column-width="9.723cm"/>
    </style:style>
    <style:style style:name="Tabla5.B" style:family="table-column">
      <style:table-column-properties style:column-width="5.258cm"/>
    </style:style>
    <style:style style:name="Tabla5.1" style:family="table-row">
      <style:table-row-properties style:min-row-height="0.423cm" fo:keep-together="auto"/>
    </style:style>
    <style:style style:name="Tabla5.A1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5.3" style:family="table-row">
      <style:table-row-properties style:min-row-height="0.459cm" fo:keep-together="auto"/>
    </style:style>
    <style:style style:name="Tabla5.4" style:family="table-row">
      <style:table-row-properties style:min-row-height="0.564cm" fo:keep-together="auto"/>
    </style:style>
    <style:style style:name="Tabla5.5" style:family="table-row">
      <style:table-row-properties style:min-row-height="0.635cm" fo:keep-together="auto"/>
    </style:style>
    <style:style style:name="Tabla6" style:family="table">
      <style:table-properties style:width="14.982cm" fo:margin-left="0.009cm" fo:margin-top="0cm" fo:margin-bottom="0cm" table:align="left" style:writing-mode="page"/>
    </style:style>
    <style:style style:name="Tabla6.A" style:family="table-column">
      <style:table-column-properties style:column-width="9.716cm"/>
    </style:style>
    <style:style style:name="Tabla6.B" style:family="table-column">
      <style:table-column-properties style:column-width="5.265cm"/>
    </style:style>
    <style:style style:name="Tabla6.1" style:family="table-row">
      <style:table-row-properties style:min-row-height="0.847cm" fo:keep-together="auto"/>
    </style:style>
    <style:style style:name="Tabla6.A1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6.2" style:family="table-row">
      <style:table-row-properties style:min-row-height="0.423cm" fo:keep-together="auto"/>
    </style:style>
    <style:style style:name="Tabla6.3" style:family="table-row">
      <style:table-row-properties style:min-row-height="0.755cm" fo:keep-together="auto"/>
    </style:style>
    <style:style style:name="Tabla7" style:family="table">
      <style:table-properties style:width="14.982cm" fo:margin-left="0.009cm" fo:margin-top="0cm" fo:margin-bottom="0cm" table:align="left" style:writing-mode="page"/>
    </style:style>
    <style:style style:name="Tabla7.A" style:family="table-column">
      <style:table-column-properties style:column-width="13.702cm"/>
    </style:style>
    <style:style style:name="Tabla7.B" style:family="table-column">
      <style:table-column-properties style:column-width="1.279cm"/>
    </style:style>
    <style:style style:name="Tabla7.1" style:family="table-row">
      <style:table-row-properties style:min-row-height="0.847cm" fo:keep-together="auto"/>
    </style:style>
    <style:style style:name="Tabla7.A1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7.2" style:family="table-row">
      <style:table-row-properties style:min-row-height="0.423cm" fo:keep-together="auto"/>
    </style:style>
    <style:style style:name="Tabla8" style:family="table">
      <style:table-properties style:width="14.982cm" fo:margin-left="0.009cm" fo:margin-top="0cm" fo:margin-bottom="0cm" table:align="left" style:writing-mode="page"/>
    </style:style>
    <style:style style:name="Tabla8.A" style:family="table-column">
      <style:table-column-properties style:column-width="13.63cm"/>
    </style:style>
    <style:style style:name="Tabla8.B" style:family="table-column">
      <style:table-column-properties style:column-width="1.351cm"/>
    </style:style>
    <style:style style:name="Tabla8.1" style:family="table-row">
      <style:table-row-properties style:min-row-height="0.847cm" fo:keep-together="auto"/>
    </style:style>
    <style:style style:name="Tabla8.A1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8.2" style:family="table-row">
      <style:table-row-properties style:min-row-height="0.423cm" fo:keep-together="auto"/>
    </style:style>
    <style:style style:name="Tabla9" style:family="table">
      <style:table-properties style:width="14.982cm" fo:margin-left="0.009cm" fo:margin-top="0cm" fo:margin-bottom="0cm" table:align="left" style:writing-mode="page"/>
    </style:style>
    <style:style style:name="Tabla9.A" style:family="table-column">
      <style:table-column-properties style:column-width="12.046cm"/>
    </style:style>
    <style:style style:name="Tabla9.B" style:family="table-column">
      <style:table-column-properties style:column-width="2.935cm"/>
    </style:style>
    <style:style style:name="Tabla9.1" style:family="table-row">
      <style:table-row-properties style:min-row-height="0.847cm" fo:keep-together="auto"/>
    </style:style>
    <style:style style:name="Tabla9.A1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9.2" style:family="table-row">
      <style:table-row-properties style:min-row-height="0.423cm" fo:keep-together="auto"/>
    </style:style>
    <style:style style:name="Tabla10" style:family="table">
      <style:table-properties style:width="14.982cm" fo:margin-left="0.009cm" fo:margin-top="0cm" fo:margin-bottom="0cm" table:align="left" style:writing-mode="page"/>
    </style:style>
    <style:style style:name="Tabla10.A" style:family="table-column">
      <style:table-column-properties style:column-width="8.287cm"/>
    </style:style>
    <style:style style:name="Tabla10.B" style:family="table-column">
      <style:table-column-properties style:column-width="6.694cm"/>
    </style:style>
    <style:style style:name="Tabla10.1" style:family="table-row">
      <style:table-row-properties style:min-row-height="0.847cm" fo:keep-together="auto"/>
    </style:style>
    <style:style style:name="Tabla10.A1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1" style:family="table">
      <style:table-properties style:width="14.982cm" fo:margin-left="0.009cm" fo:margin-top="0cm" fo:margin-bottom="0cm" table:align="left" style:writing-mode="page"/>
    </style:style>
    <style:style style:name="Tabla11.A" style:family="table-column">
      <style:table-column-properties style:column-width="14.268cm"/>
    </style:style>
    <style:style style:name="Tabla11.B" style:family="table-column">
      <style:table-column-properties style:column-width="0.713cm"/>
    </style:style>
    <style:style style:name="Tabla11.1" style:family="table-row">
      <style:table-row-properties style:min-row-height="0.847cm" fo:keep-together="auto"/>
    </style:style>
    <style:style style:name="Tabla11.A1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2" style:family="table">
      <style:table-properties style:width="14.982cm" fo:margin-left="0.009cm" fo:margin-top="0cm" fo:margin-bottom="0cm" table:align="left" style:writing-mode="page"/>
    </style:style>
    <style:style style:name="Tabla12.A" style:family="table-column">
      <style:table-column-properties style:column-width="14.224cm"/>
    </style:style>
    <style:style style:name="Tabla12.B" style:family="table-column">
      <style:table-column-properties style:column-width="0.757cm"/>
    </style:style>
    <style:style style:name="Tabla12.1" style:family="table-row">
      <style:table-row-properties style:min-row-height="0.847cm" fo:keep-together="auto"/>
    </style:style>
    <style:style style:name="Tabla12.A1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3" style:family="table">
      <style:table-properties style:width="14.982cm" fo:margin-left="0.009cm" fo:margin-top="0cm" fo:margin-bottom="0cm" table:align="left" style:writing-mode="page"/>
    </style:style>
    <style:style style:name="Tabla13.A" style:family="table-column">
      <style:table-column-properties style:column-width="14.235cm"/>
    </style:style>
    <style:style style:name="Tabla13.B" style:family="table-column">
      <style:table-column-properties style:column-width="0.746cm"/>
    </style:style>
    <style:style style:name="Tabla13.1" style:family="table-row">
      <style:table-row-properties style:min-row-height="0.847cm" fo:keep-together="auto"/>
    </style:style>
    <style:style style:name="Tabla13.A1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" style:family="table">
      <style:table-properties style:width="14.982cm" fo:margin-left="0.009cm" fo:margin-top="0cm" fo:margin-bottom="0cm" table:align="left" style:writing-mode="page"/>
    </style:style>
    <style:style style:name="Tabla14.A" style:family="table-column">
      <style:table-column-properties style:column-width="1.014cm"/>
    </style:style>
    <style:style style:name="Tabla14.B" style:family="table-column">
      <style:table-column-properties style:column-width="5.533cm"/>
    </style:style>
    <style:style style:name="Tabla14.C" style:family="table-column">
      <style:table-column-properties style:column-width="1.838cm"/>
    </style:style>
    <style:style style:name="Tabla14.D" style:family="table-column">
      <style:table-column-properties style:column-width="1.79cm"/>
    </style:style>
    <style:style style:name="Tabla14.E" style:family="table-column">
      <style:table-column-properties style:column-width="4.807cm"/>
    </style:style>
    <style:style style:name="Tabla14.1" style:family="table-row">
      <style:table-row-properties style:min-row-height="0.917cm" fo:keep-together="auto"/>
    </style:style>
    <style:style style:name="Tabla14.A1" style:family="table-cell">
      <style:table-cell-properties style:vertical-align="middle" fo:background-color="#c00000" fo:padding-left="0.123cm" fo:padding-right="0.123cm" fo:padding-top="0.176cm" fo:padding-bottom="0.176cm" fo:border="0.5pt solid #000000">
        <style:background-image/>
      </style:table-cell-properties>
    </style:style>
    <style:style style:name="Tabla14.2" style:family="table-row">
      <style:table-row-properties style:min-row-height="0.459cm" fo:keep-together="auto"/>
    </style:style>
    <style:style style:name="Tabla14.A2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B2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C2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D2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E2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A3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B3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C3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D3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E3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A4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B4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C4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D4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E4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5" style:family="table-row">
      <style:table-row-properties style:min-row-height="1.411cm" fo:keep-together="auto"/>
    </style:style>
    <style:style style:name="Tabla14.A5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B5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C5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D5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E5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A6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B6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C6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D6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E6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A7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B7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C7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D7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E7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A8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B8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C8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D8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E8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A9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B9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C9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D9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E9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A10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B10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C10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D10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E10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A11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B11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C11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D11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E11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A12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B12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C12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D12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E12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A13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B13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C13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D13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E13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A14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B14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C14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D14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E14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A15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B15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C15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D15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E15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A16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B16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C16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D16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E16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A17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B17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C17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D17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E17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A18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B18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C18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D18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E18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A19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B19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C19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D19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E19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A20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B20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C20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D20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E20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A21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B21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C21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D21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E21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A22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B22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C22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D22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E22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A23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B23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C23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D23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Tabla14.E23" style:family="table-cell">
      <style:table-cell-properties style:vertical-align="middle" fo:padding-left="0.123cm" fo:padding-right="0.123cm" fo:padding-top="0.176cm" fo:padding-bottom="0.176cm" fo:border="0.5pt solid #000000"/>
    </style:style>
    <style:style style:name="P1" style:family="paragraph" style:parent-style-name="Standard" style:master-page-name="Standard">
      <style:paragraph-properties fo:margin-left="5.429cm" fo:margin-top="0.097cm" fo:margin-bottom="0cm" style:contextual-spacing="false" fo:line-height="200%" style:page-number="1"/>
    </style:style>
    <style:style style:name="P2" style:family="paragraph" style:parent-style-name="Standard">
      <style:paragraph-properties fo:margin-left="5.429cm" fo:margin-top="0.097cm" fo:margin-bottom="0cm" style:contextual-spacing="false" fo:line-height="200%" fo:text-indent="-5.429cm" style:auto-text-indent="false"/>
    </style:style>
    <style:style style:name="P3" style:family="paragraph" style:parent-style-name="Standard">
      <style:paragraph-properties fo:margin-left="0.245cm" fo:margin-top="0cm" fo:margin-bottom="0cm" style:contextual-spacing="false" fo:line-height="200%"/>
    </style:style>
    <style:style style:name="P4" style:family="paragraph" style:parent-style-name="Standard">
      <style:paragraph-properties fo:margin-left="0.245cm" fo:margin-top="0.007cm" fo:margin-bottom="0cm" style:contextual-spacing="false" fo:line-height="200%"/>
    </style:style>
    <style:style style:name="P5" style:family="paragraph" style:parent-style-name="Standard">
      <style:paragraph-properties fo:margin-left="0.245cm" fo:margin-top="0.021cm" fo:margin-bottom="0cm" style:contextual-spacing="false" fo:line-height="200%"/>
    </style:style>
    <style:style style:name="P6" style:family="paragraph" style:parent-style-name="Standard">
      <style:paragraph-properties fo:margin-left="0.282cm" fo:margin-top="0cm" fo:margin-bottom="0cm" style:contextual-spacing="false" fo:line-height="200%"/>
    </style:style>
    <style:style style:name="P7" style:family="paragraph" style:parent-style-name="Standard">
      <style:paragraph-properties fo:margin-top="0cm" fo:margin-bottom="0cm" style:contextual-spacing="false" fo:line-height="200%"/>
    </style:style>
    <style:style style:name="P8" style:family="paragraph" style:parent-style-name="Standard">
      <style:paragraph-properties fo:margin-left="0.058cm" fo:margin-top="0.007cm" fo:margin-bottom="0cm" style:contextual-spacing="false" fo:line-height="200%"/>
    </style:style>
    <style:style style:name="P9" style:family="paragraph" style:parent-style-name="Standard">
      <style:paragraph-properties fo:margin-left="0.693cm" fo:margin-top="0.007cm" fo:margin-bottom="0cm" style:contextual-spacing="false" fo:line-height="200%"/>
    </style:style>
    <style:style style:name="P10" style:family="paragraph" style:parent-style-name="Standard">
      <style:paragraph-properties fo:margin-left="0.693cm" fo:margin-top="0.026cm" fo:margin-bottom="0cm" style:contextual-spacing="false" fo:line-height="200%"/>
    </style:style>
    <style:style style:name="P11" style:family="paragraph" style:parent-style-name="Standard">
      <style:paragraph-properties fo:margin-left="0.693cm" fo:margin-top="0.009cm" fo:margin-bottom="0cm" style:contextual-spacing="false" fo:line-height="200%"/>
    </style:style>
    <style:style style:name="P12" style:family="paragraph" style:parent-style-name="Standard">
      <style:paragraph-properties fo:margin-left="0.693cm" fo:margin-top="0.018cm" fo:margin-bottom="0cm" style:contextual-spacing="false" fo:line-height="200%"/>
    </style:style>
    <style:style style:name="P13" style:family="paragraph" style:parent-style-name="Standard">
      <style:paragraph-properties fo:margin-left="0.291cm" fo:margin-top="0cm" fo:margin-bottom="0cm" style:contextual-spacing="false" fo:line-height="200%"/>
    </style:style>
    <style:style style:name="P14" style:family="paragraph" style:parent-style-name="Standard">
      <style:paragraph-properties fo:margin-top="0cm" fo:margin-bottom="0cm" style:contextual-spacing="false" fo:line-height="200%" fo:text-align="center" style:justify-single-word="false"/>
    </style:style>
    <style:style style:name="P15" style:family="paragraph" style:parent-style-name="Standard">
      <style:paragraph-properties fo:margin-left="1.796cm" fo:margin-right="1.78cm" fo:margin-top="0.007cm" fo:margin-bottom="0cm" style:contextual-spacing="false" fo:line-height="200%" fo:text-align="center" style:justify-single-word="false"/>
    </style:style>
    <style:style style:name="P16" style:family="paragraph" style:parent-style-name="Standard">
      <style:paragraph-properties fo:margin-left="0.129cm" fo:margin-right="0.131cm" fo:margin-top="0.007cm" fo:margin-bottom="0cm" style:contextual-spacing="false" fo:line-height="200%" fo:text-align="center" style:justify-single-word="false"/>
    </style:style>
    <style:style style:name="P17" style:family="paragraph" style:parent-style-name="Standard">
      <style:paragraph-properties fo:margin-left="0.131cm" fo:margin-right="0.131cm" fo:margin-top="0.023cm" fo:margin-bottom="0cm" style:contextual-spacing="false" fo:line-height="200%" fo:text-align="center" style:justify-single-word="false"/>
    </style:style>
    <style:style style:name="P18" style:family="paragraph" style:parent-style-name="Standard">
      <style:paragraph-properties fo:margin-left="0.106cm" fo:margin-right="0.109cm" fo:margin-top="0.007cm" fo:margin-bottom="0cm" style:contextual-spacing="false" fo:line-height="200%" fo:text-align="center" style:justify-single-word="false"/>
    </style:style>
    <style:style style:name="P19" style:family="paragraph" style:parent-style-name="Standard">
      <style:paragraph-properties fo:margin-left="0.109cm" fo:margin-right="0.109cm" fo:margin-top="0.023cm" fo:margin-bottom="0cm" style:contextual-spacing="false" fo:line-height="200%" fo:text-align="center" style:justify-single-word="false"/>
    </style:style>
    <style:style style:name="P20" style:family="paragraph" style:parent-style-name="Standard">
      <style:paragraph-properties fo:margin-top="0cm" fo:margin-bottom="0.423cm" style:contextual-spacing="false" fo:line-height="200%"/>
    </style:style>
    <style:style style:name="P21" style:family="paragraph" style:parent-style-name="Standard">
      <style:paragraph-properties fo:margin-top="0cm" fo:margin-bottom="0cm" style:contextual-spacing="false" fo:line-height="200%" fo:text-align="end" style:justify-single-word="false"/>
    </style:style>
    <style:style style:name="P22" style:family="paragraph" style:parent-style-name="Standard">
      <style:paragraph-properties fo:margin-left="0.295cm" fo:margin-top="0.007cm" fo:margin-bottom="0cm" style:contextual-spacing="false" fo:line-height="200%"/>
    </style:style>
    <style:style style:name="P23" style:family="paragraph" style:parent-style-name="Standard">
      <style:paragraph-properties fo:margin-left="1.91cm" fo:margin-top="0.007cm" fo:margin-bottom="0cm" style:contextual-spacing="false" fo:line-height="200%"/>
    </style:style>
    <style:style style:name="P24" style:family="paragraph" style:parent-style-name="Standard">
      <style:paragraph-properties fo:margin-left="0.194cm" fo:margin-top="0.007cm" fo:margin-bottom="0cm" style:contextual-spacing="false" fo:line-height="200%"/>
    </style:style>
    <style:style style:name="P25" style:family="paragraph" style:parent-style-name="Standard">
      <style:paragraph-properties fo:margin-left="0.192cm" fo:margin-top="0.007cm" fo:margin-bottom="0cm" style:contextual-spacing="false" fo:line-height="200%"/>
    </style:style>
    <style:style style:name="P26" style:family="paragraph" style:parent-style-name="Standard">
      <style:paragraph-properties fo:margin-left="0.192cm" fo:margin-right="1.81cm" fo:margin-top="0.007cm" fo:margin-bottom="0cm" style:contextual-spacing="false" fo:line-height="200%"/>
    </style:style>
    <style:style style:name="P27" style:family="paragraph" style:parent-style-name="Standard">
      <style:paragraph-properties fo:margin-left="0.192cm" fo:margin-top="0.004cm" fo:margin-bottom="0cm" style:contextual-spacing="false" fo:line-height="200%"/>
    </style:style>
    <style:style style:name="P28" style:family="paragraph" style:parent-style-name="Standard">
      <style:paragraph-properties fo:margin-left="0.192cm" fo:margin-top="0.028cm" fo:margin-bottom="0cm" style:contextual-spacing="false" fo:line-height="200%"/>
    </style:style>
    <style:style style:name="P29" style:family="paragraph" style:parent-style-name="Standard">
      <style:paragraph-properties fo:margin-left="0.192cm" fo:margin-right="0.949cm" fo:margin-top="0.007cm" fo:margin-bottom="0cm" style:contextual-spacing="false" fo:line-height="200%"/>
    </style:style>
    <style:style style:name="P30" style:family="paragraph" style:parent-style-name="Standard">
      <style:paragraph-properties fo:margin-left="0.192cm" fo:margin-top="0.03cm" fo:margin-bottom="0cm" style:contextual-spacing="false" fo:line-height="200%"/>
    </style:style>
    <style:style style:name="P31" style:family="paragraph" style:parent-style-name="Standard">
      <style:paragraph-properties fo:margin-left="0.192cm" fo:margin-right="0.309cm" fo:margin-top="0.007cm" fo:margin-bottom="0cm" style:contextual-spacing="false" fo:line-height="200%"/>
    </style:style>
    <style:style style:name="P32" style:family="paragraph" style:parent-style-name="Standard">
      <style:paragraph-properties fo:margin-left="0.189cm" fo:margin-top="0cm" fo:margin-bottom="0cm" style:contextual-spacing="false" fo:line-height="200%"/>
    </style:style>
    <style:style style:name="P33" style:family="paragraph" style:parent-style-name="Standard">
      <style:paragraph-properties fo:margin-top="0.097cm" fo:margin-bottom="0cm" style:contextual-spacing="false" fo:line-height="200%"/>
    </style:style>
    <style:style style:name="P34" style:family="paragraph" style:parent-style-name="Standard">
      <style:paragraph-properties fo:margin-top="0cm" fo:margin-bottom="0cm" style:contextual-spacing="false" fo:line-height="200%" fo:text-align="justify" style:justify-single-word="false"/>
    </style:style>
    <style:style style:name="P35" style:family="paragraph" style:parent-style-name="Standard">
      <style:paragraph-properties fo:margin-top="0.494cm" fo:margin-bottom="0.494cm" style:contextual-spacing="false" fo:line-height="200%"/>
    </style:style>
    <style:style style:name="P36" style:family="paragraph" style:parent-style-name="Standard">
      <style:paragraph-properties fo:margin-top="0cm" fo:margin-bottom="0cm" style:contextual-spacing="false" fo:line-height="2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7" style:family="paragraph" style:parent-style-name="Standard">
      <style:paragraph-properties fo:margin-top="0cm" fo:margin-bottom="0.423cm" style:contextual-spacing="false" fo:line-height="2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8" style:family="paragraph" style:parent-style-name="Standard">
      <style:paragraph-properties fo:margin-top="0cm" fo:margin-bottom="0cm" style:contextual-spacing="false" fo:line-height="200%"/>
      <style:text-properties fo:color="#000000" loext:opacity="100%" style:font-name="Times New Roman" fo:font-size="12pt" style:font-name-asian="Arial" style:font-size-asian="12pt" style:font-name-complex="Arial" style:font-size-complex="12pt"/>
    </style:style>
    <style:style style:name="T1" style:family="text">
      <style:text-properties fo:color="#000000" loext:opacity="100%" style:font-name="Times New Roman" fo:font-size="12pt" fo:font-weight="bold" style:font-name-asian="Arial" style:font-size-asian="12pt" style:font-weight-asian="bold" style:font-name-complex="Arial" style:font-size-complex="12pt"/>
    </style:style>
    <style:style style:name="T2" style:family="text">
      <style:text-properties fo:color="#000000" loext:opacity="100%" style:font-name="Times New Roman" fo:font-size="12pt" fo:font-weight="bold" style:font-name-asian="Trebuchet MS" style:font-size-asian="12pt" style:font-weight-asian="bold" style:font-name-complex="Trebuchet MS" style:font-size-complex="12pt"/>
    </style:style>
    <style:style style:name="T3" style:family="text">
      <style:text-properties fo:color="#000000" loext:opacity="100%" style:font-name="Times New Roman" fo:font-size="12pt" style:font-size-asian="12pt" style:font-size-complex="12pt"/>
    </style:style>
    <style:style style:name="T4" style:family="text">
      <style:text-properties fo:color="#000000" loext:opacity="100%" style:font-name="Times New Roman" fo:font-size="12pt" style:font-name-asian="Arial" style:font-size-asian="12pt" style:font-name-complex="Arial" style:font-size-complex="12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8" style:family="text">
      <style:text-properties fo:color="#ffffff" loext:opacity="100%" style:font-name="Times New Roman" fo:font-size="12pt" fo:font-weight="bold" style:font-name-asian="Trebuchet MS" style:font-size-asian="12pt" style:font-weight-asian="bold" style:font-name-complex="Trebuchet MS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5"><text:span text:style-name="T1">DIAGNÓSTICO DE EMPRESAS</text:span><text:span text:style-name="T1"/></text:p>
        <text:p text:style-name="P2" loext:marker-style-name="T5"><text:span text:style-name="T1">1. Datos generales:</text:span><text:span text:style-name="T1"/></text:p>
        <text:p text:style-name="P36" loext:marker-style-name="T6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P3" loext:marker-style-name="T5"><text:span text:style-name="T8">Razón social de la empresa:</text:span><text:span text:style-name="T8"/></text:p>
            </table:table-cell>
            <table:table-cell table:style-name="Tabla1.B1" office:value-type="string">
              <text:p text:style-name="P6" loext:marker-style-name="T5"><text:span text:style-name="T3"><text:s/>20601813557 – Cooperativa Agraria Valle de Jequetepeque - Coavaje</text:span><text:span text:style-name="T3"/></text:p>
            </table:table-cell>
          </table:table-row>
          <table:table-row table:style-name="Tabla1.2">
            <table:table-cell table:style-name="Tabla1.A1" office:value-type="string">
              <text:p text:style-name="P4" loext:marker-style-name="T5"><text:span text:style-name="T8">Nombres y apellidos de la persona que</text:span><text:span text:style-name="T8"/></text:p>
              <text:p text:style-name="P5" loext:marker-style-name="T5"><text:span text:style-name="T8">responde la entrevista:</text:span><text:span text:style-name="T8"/></text:p>
            </table:table-cell>
            <table:table-cell table:style-name="Tabla1.B2" office:value-type="string">
              <text:p text:style-name="P6" loext:marker-style-name="T5"><text:span text:style-name="T3">Pedro Concepción</text:span><text:span text:style-name="T3"/></text:p>
            </table:table-cell>
          </table:table-row>
          <table:table-row table:style-name="Tabla1.3">
            <table:table-cell table:style-name="Tabla1.A1" office:value-type="string">
              <text:p text:style-name="P4" loext:marker-style-name="T5"><text:span text:style-name="T8">Cargo:</text:span><text:span text:style-name="T8"/></text:p>
            </table:table-cell>
            <table:table-cell table:style-name="Tabla1.B3" office:value-type="string">
              <text:p text:style-name="P6" loext:marker-style-name="T5"><text:span text:style-name="T3">Gerente general</text:span><text:span text:style-name="T3"/></text:p>
            </table:table-cell>
          </table:table-row>
          <table:table-row table:style-name="Tabla1.3">
            <table:table-cell table:style-name="Tabla1.A1" office:value-type="string">
              <text:p text:style-name="P4" loext:marker-style-name="T5"><text:span text:style-name="T8">Tiempo que labora en la empresa:</text:span><text:span text:style-name="T8"/></text:p>
            </table:table-cell>
            <table:table-cell table:style-name="Tabla1.B4" office:value-type="string">
              <text:p text:style-name="P6" loext:marker-style-name="T5"><text:span text:style-name="T3">2 años</text:span><text:span text:style-name="T3"/></text:p>
            </table:table-cell>
          </table:table-row>
          <table:table-row table:style-name="Tabla1.3">
            <table:table-cell table:style-name="Tabla1.A1" office:value-type="string">
              <text:p text:style-name="P4" loext:marker-style-name="T5"><text:span text:style-name="T8">e-mail:</text:span><text:span text:style-name="T8"/></text:p>
            </table:table-cell>
            <table:table-cell table:style-name="Tabla1.B5" office:value-type="string">
              <text:p text:style-name="P6" loext:marker-style-name="T5"><text:span text:style-name="T3">pconcepcion@coavaje.com</text:span><text:span text:style-name="T3"/></text:p>
            </table:table-cell>
          </table:table-row>
          <table:table-row table:style-name="Tabla1.3">
            <table:table-cell table:style-name="Tabla1.A1" office:value-type="string">
              <text:p text:style-name="P4" loext:marker-style-name="T5"><text:span text:style-name="T8">Sector:</text:span><text:span text:style-name="T8"/></text:p>
            </table:table-cell>
            <table:table-cell table:style-name="Tabla1.B6" office:value-type="string">
              <text:p text:style-name="P6" loext:marker-style-name="T5"><text:span text:style-name="T3">Agrícola</text:span><text:span text:style-name="T3"/></text:p>
            </table:table-cell>
          </table:table-row>
          <table:table-row table:style-name="Tabla1.3">
            <table:table-cell table:style-name="Tabla1.A1" office:value-type="string">
              <text:p text:style-name="P4" loext:marker-style-name="T5"><text:span text:style-name="T8">Lugar de entrevista:</text:span><text:span text:style-name="T8"/></text:p>
            </table:table-cell>
            <table:table-cell table:style-name="Tabla1.B7" office:value-type="string">
              <text:p text:style-name="P6" loext:marker-style-name="T5"><text:span text:style-name="T3">Cámara de Comercio y Producción de La Libertad</text:span><text:span text:style-name="T3"/></text:p>
            </table:table-cell>
          </table:table-row>
          <table:table-row table:style-name="Tabla1.3">
            <table:table-cell table:style-name="Tabla1.A1" office:value-type="string">
              <text:p text:style-name="P4" loext:marker-style-name="T5"><text:span text:style-name="T8">Fecha de la entrevista:</text:span><text:span text:style-name="T8"/></text:p>
            </table:table-cell>
            <table:table-cell table:style-name="Tabla1.B8" office:value-type="string">
              <text:p text:style-name="P6" loext:marker-style-name="T5"><text:span text:style-name="T3">12-10-2019</text:span><text:span text:style-name="T3"/></text:p>
            </table:table-cell>
          </table:table-row>
          <table:table-row table:style-name="Tabla1.3">
            <table:table-cell table:style-name="Tabla1.A1" office:value-type="string">
              <text:p text:style-name="P4" loext:marker-style-name="T5"><text:span text:style-name="T8">Responsable de la entrevista (asesor):</text:span><text:span text:style-name="T8"/></text:p>
            </table:table-cell>
            <table:table-cell table:style-name="Tabla1.B9" office:value-type="string">
              <text:p text:style-name="P6" loext:marker-style-name="T5"><text:span text:style-name="T3">Grupo 5 – Integrantes: Ambar García,…</text:span><text:span text:style-name="T3"/></text:p>
            </table:table-cell>
          </table:table-row>
          <table:table-row table:style-name="Tabla1.3">
            <table:table-cell table:style-name="Tabla1.A1" office:value-type="string">
              <text:p text:style-name="P4" loext:marker-style-name="T5"><text:span text:style-name="T8">Producto seleccionado para el estudio:</text:span><text:span text:style-name="T8"/></text:p>
            </table:table-cell>
            <table:table-cell table:style-name="Tabla1.B10" office:value-type="string">
              <text:p text:style-name="P6" loext:marker-style-name="T5"><text:span text:style-name="T3">Esparrago fresco con certificación de Comercio justo</text:span><text:span text:style-name="T3"/></text:p>
            </table:table-cell>
          </table:table-row>
          <table:table-row table:style-name="Tabla1.3">
            <table:table-cell table:style-name="Tabla1.A1" office:value-type="string">
              <text:p text:style-name="P4" loext:marker-style-name="T5"><text:span text:style-name="T8">Partida Arancelaria:</text:span><text:span text:style-name="T8"/></text:p>
            </table:table-cell>
            <table:table-cell table:style-name="Tabla1.B11" office:value-type="string">
              <text:p text:style-name="P6" loext:marker-style-name="T5"><text:span text:style-name="T3">0709200000</text:span><text:span text:style-name="T3"/></text:p>
            </table:table-cell>
          </table:table-row>
        </table:table>
        <text:p text:style-name="P7" loext:marker-style-name="T5"><text:span text:style-name="T6"><text:s/></text:span><text:span text:style-name="T6"/></text:p>
        <text:p text:style-name="P2" loext:marker-style-name="T5"><text:span text:style-name="T1">2. Información:</text:span><text:span text:style-name="T1"/></text:p>
        <text:p text:style-name="P36" loext:marker-style-name="T6"/>
        <table:table table:name="Tabla2" table:style-name="Tabla2">
          <table:table-column table:style-name="Tabla2.A"/>
          <text:soft-page-break/>
          <table:table-row table:style-name="Tabla2.1">
            <table:table-cell table:style-name="Tabla2.A1" office:value-type="string">
              <text:p text:style-name="P8" loext:marker-style-name="T5"><text:span text:style-name="T2">1. Coloque en los casilleros los principales productos y/o servicios exportados por la empresa.</text:span><text:span text:style-name="T2"/></text:p>
            </table:table-cell>
          </table:table-row>
          <table:table-row table:style-name="Tabla2.1">
            <table:table-cell table:style-name="Tabla2.A1" office:value-type="string">
              <text:p text:style-name="P7" loext:marker-style-name="T5"><text:span text:style-name="T3">- Espárrago verde</text:span><text:span text:style-name="T3"/></text:p>
            </table:table-cell>
          </table:table-row>
          <table:table-row table:style-name="Tabla2.1">
            <table:table-cell table:style-name="Tabla2.A1" office:value-type="string">
              <text:p text:style-name="P7" loext:marker-style-name="T5"><text:span text:style-name="T3">- Quinua</text:span><text:span text:style-name="T3"/></text:p>
            </table:table-cell>
          </table:table-row>
          <table:table-row table:style-name="Tabla2.1">
            <table:table-cell table:style-name="Tabla2.A1" office:value-type="string">
              <text:p text:style-name="P7" loext:marker-style-name="T5"><text:span text:style-name="T3">- Arándanos (proyecto piloto)</text:span><text:span text:style-name="T3"/></text:p>
            </table:table-cell>
          </table:table-row>
        </table:table>
        <text:p text:style-name="P36" loext:marker-style-name="T6"/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table:number-columns-spanned="2" office:value-type="string">
              <text:p text:style-name="P8" loext:marker-style-name="T5"><text:span text:style-name="T2">2. Señalar la capacidad productiva mensual de la empresa (identificar un producto específico)</text:span><text:span text:style-name="T2"/></text:p>
            </table:table-cell>
            <table:covered-table-cell/>
          </table:table-row>
          <table:table-row table:style-name="Tabla3.1">
            <table:table-cell table:style-name="Tabla3.A1" office:value-type="string">
              <text:p text:style-name="P9" loext:marker-style-name="T5"><text:span text:style-name="T3">Capacidad productiva semestral</text:span><text:span text:style-name="T3"/></text:p>
            </table:table-cell>
            <table:table-cell table:style-name="Tabla3.A1" office:value-type="string">
              <text:p text:style-name="P13" loext:marker-style-name="T5"><text:span text:style-name="T3">600 a 700 toneladas</text:span><text:span text:style-name="T3"/></text:p>
            </table:table-cell>
          </table:table-row>
          <table:table-row table:style-name="Tabla3.3">
            <table:table-cell table:style-name="Tabla3.A1" office:value-type="string">
              <text:p text:style-name="P9" loext:marker-style-name="T5"><text:span text:style-name="T3">¿Qué % de su capacidad instalada de producción está utilizando</text:span><text:span text:style-name="T3"/></text:p>
              <text:p text:style-name="P10" loext:marker-style-name="T5"><text:span text:style-name="T3">actualmente?</text:span><text:span text:style-name="T3"/></text:p>
            </table:table-cell>
            <table:table-cell table:style-name="Tabla3.A1" office:value-type="string">
              <text:p text:style-name="P13" loext:marker-style-name="T5"><text:span text:style-name="T3">100% de 230 hectáreas</text:span><text:span text:style-name="T3"/></text:p>
            </table:table-cell>
          </table:table-row>
        </table:table>
        <text:p text:style-name="P36" loext:marker-style-name="T6"/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table:number-columns-spanned="2" office:value-type="string">
              <text:p text:style-name="P8" loext:marker-style-name="T5"><text:span text:style-name="T2">3. Indique en el casillero el número de trabajadores en la planilla de la empresa.</text:span><text:span text:style-name="T2"/></text:p>
            </table:table-cell>
            <table:covered-table-cell/>
          </table:table-row>
          <table:table-row table:style-name="Tabla4.1">
            <table:table-cell table:style-name="Tabla4.A1" office:value-type="string">
              <text:p text:style-name="P9" loext:marker-style-name="T5"><text:span text:style-name="T3">Número de trabajadores en la planilla de la empresa</text:span><text:span text:style-name="T3"/></text:p>
            </table:table-cell>
            <table:table-cell table:style-name="Tabla4.A1" office:value-type="string">
              <text:p text:style-name="P13" loext:marker-style-name="T5"><text:span text:style-name="T3">6 trabajadores</text:span><text:span text:style-name="T3"/></text:p>
            </table:table-cell>
          </table:table-row>
          <table:table-row table:style-name="Tabla4.1">
            <table:table-cell table:style-name="Tabla4.A1" office:value-type="string">
              <text:p text:style-name="P9" loext:marker-style-name="T5"><text:span text:style-name="T3">Cargos:</text:span><text:span text:style-name="T3"/></text:p>
            </table:table-cell>
            <table:table-cell table:style-name="Tabla4.A1" office:value-type="string">
              <text:p text:style-name="P13" loext:marker-style-name="T5"><text:span text:style-name="T3">Gerencia general (1)</text:span><text:span text:style-name="T3"/></text:p>
              <text:p text:style-name="P13" loext:marker-style-name="T5"><text:span text:style-name="T3">Administración (1)</text:span><text:span text:style-name="T3"/></text:p>
              <text:p text:style-name="P13" loext:marker-style-name="T5"><text:span text:style-name="T3">Contabilidad (1)</text:span><text:span text:style-name="T3"/></text:p>
              <text:p text:style-name="P13" loext:marker-style-name="T5"><text:span text:style-name="T3">Asesoría técnica (1)</text:span><text:span text:style-name="T3"/></text:p>
              <text:p text:style-name="P13" loext:marker-style-name="T5"><text:span text:style-name="T3">Responsable de la organización (1)</text:span><text:span text:style-name="T3"/></text:p>
              <text:p text:style-name="P13" loext:marker-style-name="T5"><text:span text:style-name="T3">Apoyo en asesoría técnica (1)</text:span><text:span text:style-name="T3"/></text:p>
            </table:table-cell>
          </table:table-row>
        </table:table>
        <text:p text:style-name="P7" loext:marker-style-name="T5"><text:span text:style-name="T1">Comentario: </text:span><text:span text:style-name="T4">La cooperativa trabaja solo en el área administrativa, los socios se encargan de la producción.</text:span></text:p>
        <text:p text:style-name="P36" loext:marker-style-name="T6"/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table:number-columns-spanned="2" office:value-type="string">
              <text:p text:style-name="P8" loext:marker-style-name="T5"><text:span text:style-name="T2">4. Indique en el casillero el número y el título de las certificaciones en proceso o vigentes.</text:span><text:span text:style-name="T2"/></text:p>
            </table:table-cell>
            <table:covered-table-cell/>
          </table:table-row>
          <table:table-row table:style-name="Tabla5.1">
            <table:table-cell table:style-name="Tabla5.A1" office:value-type="string">
              <text:p text:style-name="P9" loext:marker-style-name="T5"><text:span text:style-name="T3">Número de certificaciones vigentes:</text:span><text:span text:style-name="T3"/></text:p>
            </table:table-cell>
            <table:table-cell table:style-name="Tabla5.A1" office:value-type="string">
              <text:p text:style-name="P14" loext:marker-style-name="T5"><text:span text:style-name="T3">2</text:span><text:span text:style-name="T3"/></text:p>
            </table:table-cell>
          </table:table-row>
          <table:table-row table:style-name="Tabla5.3">
            <table:table-cell table:style-name="Tabla5.A1" office:value-type="string">
              <text:p text:style-name="P9" loext:marker-style-name="T5"><text:span text:style-name="T3">Título de las certificaciones:</text:span><text:span text:style-name="T3"/></text:p>
            </table:table-cell>
            <table:table-cell table:style-name="Tabla5.A1" office:value-type="string">
              <text:p text:style-name="P14" loext:marker-style-name="T5"><text:span text:style-name="T3">Global Gap y Fairtrade</text:span><text:span text:style-name="T3"/></text:p>
            </table:table-cell>
          </table:table-row>
          <table:table-row table:style-name="Tabla5.4">
            <table:table-cell table:style-name="Tabla5.A1" office:value-type="string">
              <text:p text:style-name="P9" loext:marker-style-name="T5"><text:span text:style-name="T3">Número de certificaciones en proceso</text:span><text:span text:style-name="T3"/></text:p>
            </table:table-cell>
            <table:table-cell table:style-name="Tabla5.A1" office:value-type="string">
              <text:p text:style-name="P14" loext:marker-style-name="T5"><text:span text:style-name="T3">1</text:span><text:span text:style-name="T3"/></text:p>
            </table:table-cell>
          </table:table-row>
          <table:table-row table:style-name="Tabla5.5">
            <table:table-cell table:style-name="Tabla5.A1" office:value-type="string">
              <text:p text:style-name="P9" loext:marker-style-name="T5"><text:span text:style-name="T3">Título de las certificaciones:</text:span><text:span text:style-name="T3"/></text:p>
            </table:table-cell>
            <table:table-cell table:style-name="Tabla5.A1" office:value-type="string">
              <text:p text:style-name="P14" loext:marker-style-name="T5"><text:span text:style-name="T3">LP Senasa</text:span><text:span text:style-name="T3"/></text:p>
            </table:table-cell>
          </table:table-row>
        </table:table>
        <text:p text:style-name="P20" loext:marker-style-name="T5"><text:span text:style-name="T6"><text:s/></text:span><text:span text:style-name="T6"/></text:p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table:number-columns-spanned="2" office:value-type="string">
              <text:p text:style-name="P8" loext:marker-style-name="T5"><text:span text:style-name="T2">5. Indique en el casillero el monto de las ventas totales de la empresa expresado en soles, correspondientes a los años:</text:span><text:span text:style-name="T2"/></text:p>
            </table:table-cell>
            <table:covered-table-cell/>
          </table:table-row>
          <table:table-row table:style-name="Tabla6.2">
            <table:table-cell table:style-name="Tabla6.A1" office:value-type="string">
              <text:p text:style-name="P9" loext:marker-style-name="T5"><text:span text:style-name="T3">Ventas totales anuales 20</text:span><text:span text:style-name="T5">22</text:span></text:p>
            </table:table-cell>
            <table:table-cell table:style-name="Tabla6.A1" office:value-type="string">
              <text:p text:style-name="P21" loext:marker-style-name="T5"><text:span text:style-name="T3">S/2,996,768.50</text:span><text:span text:style-name="T3"/></text:p>
            </table:table-cell>
          </table:table-row>
          <table:table-row table:style-name="Tabla6.3">
            <table:table-cell table:style-name="Tabla6.A1" office:value-type="string">
              <text:p text:style-name="P9" loext:marker-style-name="T5"><text:span text:style-name="T3">Ventas totales anuales 20</text:span><text:span text:style-name="T5">20</text:span></text:p>
            </table:table-cell>
            <table:table-cell table:style-name="Tabla6.A1" office:value-type="string">
              <text:p text:style-name="P21" loext:marker-style-name="T5"><text:span text:style-name="T3">S/3,942,988.77</text:span><text:span text:style-name="T3"/></text:p>
            </table:table-cell>
          </table:table-row>
          <table:table-row table:style-name="Tabla6.2">
            <table:table-cell table:style-name="Tabla6.A1" office:value-type="string">
              <text:p text:style-name="P9" loext:marker-style-name="T5"><text:span text:style-name="T3">Ventas totales anuales 20</text:span><text:span text:style-name="T5">19</text:span></text:p>
            </table:table-cell>
            <table:table-cell table:style-name="Tabla6.A1" office:value-type="string">
              <text:p text:style-name="P21" loext:marker-style-name="T5"><text:span text:style-name="T3">S/5,591,541.35</text:span><text:span text:style-name="T3"/></text:p>
            </table:table-cell>
          </table:table-row>
        </table:table>
        <text:p text:style-name="P36" loext:marker-style-name="T6"><text:soft-page-break/></text:p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table:number-columns-spanned="2" office:value-type="string">
              <text:p text:style-name="P8" loext:marker-style-name="T5"><text:span text:style-name="T2">6. Indique en los casilleros el monto de las exportaciones totales de bienes y/o servicios de la empresa expresado en dólares americanos (US$) correspondientes a los años:</text:span><text:span text:style-name="T2"/></text:p>
            </table:table-cell>
            <table:covered-table-cell/>
          </table:table-row>
          <table:table-row table:style-name="Tabla7.2">
            <table:table-cell table:style-name="Tabla7.A1" office:value-type="string">
              <text:p text:style-name="P9" loext:marker-style-name="T5"><text:span text:style-name="T3">Exportaciones anuales 20</text:span><text:span text:style-name="T5">22</text:span></text:p>
            </table:table-cell>
            <table:table-cell table:style-name="Tabla7.A1" office:value-type="string">
              <text:p text:style-name="P14" loext:marker-style-name="T5"><text:span text:style-name="T3">0</text:span><text:span text:style-name="T3"/></text:p>
            </table:table-cell>
          </table:table-row>
          <table:table-row table:style-name="Tabla7.2">
            <table:table-cell table:style-name="Tabla7.A1" office:value-type="string">
              <text:p text:style-name="P11" loext:marker-style-name="T5"><text:span text:style-name="T3">Exportaciones anuales 20</text:span><text:span text:style-name="T5">20</text:span></text:p>
            </table:table-cell>
            <table:table-cell table:style-name="Tabla7.A1" office:value-type="string">
              <text:p text:style-name="P14" loext:marker-style-name="T5"><text:span text:style-name="T3">0</text:span><text:span text:style-name="T3"/></text:p>
            </table:table-cell>
          </table:table-row>
          <table:table-row table:style-name="Tabla7.2">
            <table:table-cell table:style-name="Tabla7.A1" office:value-type="string">
              <text:p text:style-name="P9" loext:marker-style-name="T5"><text:span text:style-name="T3">Exportaciones anuales 201</text:span><text:span text:style-name="T5">9</text:span></text:p>
            </table:table-cell>
            <table:table-cell table:style-name="Tabla7.A1" office:value-type="string">
              <text:p text:style-name="P14" loext:marker-style-name="T5"><text:span text:style-name="T3">0</text:span><text:span text:style-name="T3"/></text:p>
            </table:table-cell>
          </table:table-row>
        </table:table>
        <text:p text:style-name="P37" loext:marker-style-name="T6"/>
        <table:table table:name="Tabla8" table:style-name="Tabla8">
          <table:table-column table:style-name="Tabla8.A"/>
          <table:table-column table:style-name="Tabla8.B"/>
          <table:table-row table:style-name="Tabla8.1">
            <table:table-cell table:style-name="Tabla8.A1" table:number-columns-spanned="2" office:value-type="string">
              <text:p text:style-name="P8" loext:marker-style-name="T5"><text:span text:style-name="T2">7. Indique en los casilleros correspondientes el número de clientes internacionales que ha tenido la empresa en los últimos tres años.</text:span><text:span text:style-name="T2"/></text:p>
            </table:table-cell>
            <table:covered-table-cell/>
          </table:table-row>
          <table:table-row table:style-name="Tabla8.2">
            <table:table-cell table:style-name="Tabla8.A1" office:value-type="string">
              <text:p text:style-name="P9" loext:marker-style-name="T5"><text:span text:style-name="T3">Número de clientes 20</text:span><text:span text:style-name="T5">22</text:span></text:p>
            </table:table-cell>
            <table:table-cell table:style-name="Tabla8.A1" office:value-type="string">
              <text:p text:style-name="P14" loext:marker-style-name="T5"><text:span text:style-name="T3">0</text:span><text:span text:style-name="T3"/></text:p>
            </table:table-cell>
          </table:table-row>
          <table:table-row table:style-name="Tabla8.2">
            <table:table-cell table:style-name="Tabla8.A1" office:value-type="string">
              <text:p text:style-name="P9" loext:marker-style-name="T5"><text:span text:style-name="T3">Número de clientes 20</text:span><text:span text:style-name="T5">21</text:span></text:p>
            </table:table-cell>
            <table:table-cell table:style-name="Tabla8.A1" office:value-type="string">
              <text:p text:style-name="P14" loext:marker-style-name="T5"><text:span text:style-name="T3">0</text:span><text:span text:style-name="T3"/></text:p>
            </table:table-cell>
          </table:table-row>
          <table:table-row table:style-name="Tabla8.2">
            <table:table-cell table:style-name="Tabla8.A1" office:value-type="string">
              <text:p text:style-name="P9" loext:marker-style-name="T5"><text:span text:style-name="T3">Número de clientes 20</text:span><text:span text:style-name="T5">20</text:span></text:p>
            </table:table-cell>
            <table:table-cell table:style-name="Tabla8.A1" office:value-type="string">
              <text:p text:style-name="P14" loext:marker-style-name="T5"><text:span text:style-name="T3">0</text:span><text:span text:style-name="T3"/></text:p>
            </table:table-cell>
          </table:table-row>
        </table:table>
        <text:p text:style-name="P37" loext:marker-style-name="T6"/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table:number-columns-spanned="2" office:value-type="string">
              <text:p text:style-name="P8" loext:marker-style-name="T5"><text:span text:style-name="T2">8. Indique en los casilleros los principales países de destino de las exportaciones de bienes y/o servicios de la empresa y cuál es su porcentaje con respecto al total, (100%).</text:span><text:span text:style-name="T2"/></text:p>
            </table:table-cell>
            <table:covered-table-cell/>
          </table:table-row>
          <table:table-row table:style-name="Tabla9.2">
            <table:table-cell table:style-name="Tabla9.A1" office:value-type="string">
              <text:p text:style-name="P9" loext:marker-style-name="T5"><text:span text:style-name="T3">País (1)</text:span><text:span text:style-name="T3"/></text:p>
            </table:table-cell>
            <table:table-cell table:style-name="Tabla9.A1" office:value-type="string">
              <text:p text:style-name="P14" loext:marker-style-name="T5"><text:span text:style-name="T3">0</text:span><text:span text:style-name="T3"/></text:p>
            </table:table-cell>
          </table:table-row>
          <table:table-row table:style-name="Tabla9.2">
            <table:table-cell table:style-name="Tabla9.A1" office:value-type="string">
              <text:p text:style-name="P11" loext:marker-style-name="T5"><text:span text:style-name="T3">País (2)</text:span><text:span text:style-name="T3"/></text:p>
            </table:table-cell>
            <table:table-cell table:style-name="Tabla9.A1" office:value-type="string">
              <text:p text:style-name="P14" loext:marker-style-name="T5"><text:span text:style-name="T3">0</text:span><text:span text:style-name="T3"/></text:p>
            </table:table-cell>
          </table:table-row>
          <table:table-row table:style-name="Tabla9.2">
            <table:table-cell table:style-name="Tabla9.A1" office:value-type="string">
              <text:p text:style-name="P9" loext:marker-style-name="T5"><text:span text:style-name="T3">País (3)</text:span><text:span text:style-name="T3"/></text:p>
            </table:table-cell>
            <table:table-cell table:style-name="Tabla9.A1" office:value-type="string">
              <text:p text:style-name="P14" loext:marker-style-name="T5"><text:span text:style-name="T3">0</text:span><text:span text:style-name="T3"/></text:p>
            </table:table-cell>
          </table:table-row>
          <table:table-row table:style-name="Tabla9.2">
            <table:table-cell table:style-name="Tabla9.A1" office:value-type="string">
              <text:p text:style-name="P9" loext:marker-style-name="T5"><text:span text:style-name="T3">País (2)</text:span><text:span text:style-name="T3"/></text:p>
            </table:table-cell>
            <table:table-cell table:style-name="Tabla9.A1" office:value-type="string">
              <text:p text:style-name="P14" loext:marker-style-name="T5"><text:span text:style-name="T3">0</text:span><text:span text:style-name="T3"/></text:p>
            </table:table-cell>
          </table:table-row>
        </table:table>
        <text:p text:style-name="P37" loext:marker-style-name="T6"/>
        <table:table table:name="Tabla10" table:style-name="Tabla10">
          <table:table-column table:style-name="Tabla10.A"/>
          <table:table-column table:style-name="Tabla10.B"/>
          <table:table-row table:style-name="Tabla10.1">
            <table:table-cell table:style-name="Tabla10.A1" table:number-columns-spanned="2" office:value-type="string">
              <text:p text:style-name="P8" loext:marker-style-name="T5"><text:span text:style-name="T2">9. Coloque en el casillero el número de veces en las que ha participado la empresa como visitante en ferias internacionales en los últimos 3 años.</text:span><text:span text:style-name="T2"/></text:p>
            </table:table-cell>
            <table:covered-table-cell/>
          </table:table-row>
          <table:table-row table:style-name="Tabla10.1">
            <table:table-cell table:style-name="Tabla10.A1" office:value-type="string">
              <text:p text:style-name="P9" loext:marker-style-name="T5"><text:span text:style-name="T3">Número de veces en que la empresa ha participado como visitante en</text:span><text:span text:style-name="T3"/></text:p>
              <text:p text:style-name="P10" loext:marker-style-name="T5"><text:span text:style-name="T3">ferias internacionales en los últimos 3 años.</text:span><text:span text:style-name="T3"/></text:p>
            </table:table-cell>
            <table:table-cell table:style-name="Tabla10.A1" office:value-type="string">
              <text:p text:style-name="P7" loext:marker-style-name="T5"><text:span text:style-name="T3">Expoalimentaria (Perú, 2 veces) y ferias de Fairtrade (1 vez)</text:span></text:p>
            </table:table-cell>
          </table:table-row>
        </table:table>
        <text:p text:style-name="P37" loext:marker-style-name="T6"/>
        <table:table table:name="Tabla11" table:style-name="Tabla11">
          <table:table-column table:style-name="Tabla11.A"/>
          <table:table-column table:style-name="Tabla11.B"/>
          <text:soft-page-break/>
          <table:table-row table:style-name="Tabla11.1">
            <table:table-cell table:style-name="Tabla11.A1" table:number-columns-spanned="2" office:value-type="string">
              <text:p text:style-name="P8" loext:marker-style-name="T5"><text:span text:style-name="T2">11. Coloque en el casillero el número de veces en las que ha participado la empresa como expositor en ferias internacionales en los últimos 3 años.</text:span><text:span text:style-name="T2"/></text:p>
            </table:table-cell>
            <table:covered-table-cell/>
          </table:table-row>
          <table:table-row table:style-name="Tabla11.1">
            <table:table-cell table:style-name="Tabla11.A1" office:value-type="string">
              <text:p text:style-name="P9" loext:marker-style-name="T5"><text:span text:style-name="T3">Número de veces en que la empresa ha participado como expositor</text:span><text:span text:style-name="T3"/></text:p>
              <text:p text:style-name="P12" loext:marker-style-name="T5"><text:span text:style-name="T3">en ferias internacionales en los últimos 3 años.</text:span><text:span text:style-name="T3"/></text:p>
            </table:table-cell>
            <table:table-cell table:style-name="Tabla11.A1" office:value-type="string">
              <text:p text:style-name="P14" loext:marker-style-name="T5"><text:span text:style-name="T3">0</text:span><text:span text:style-name="T3"/></text:p>
            </table:table-cell>
          </table:table-row>
        </table:table>
        <text:p text:style-name="P37" loext:marker-style-name="T6"/>
        <table:table table:name="Tabla12" table:style-name="Tabla12">
          <table:table-column table:style-name="Tabla12.A"/>
          <table:table-column table:style-name="Tabla12.B"/>
          <table:table-row table:style-name="Tabla12.1">
            <table:table-cell table:style-name="Tabla12.A1" table:number-columns-spanned="2" office:value-type="string">
              <text:p text:style-name="P8" loext:marker-style-name="T5"><text:span text:style-name="T2">12. Coloque en el casillero el número de veces en las que ha participado la empresa en Misiones Comerciales internacionales en los últimos 3 años.</text:span><text:span text:style-name="T2"/></text:p>
            </table:table-cell>
            <table:covered-table-cell/>
          </table:table-row>
          <table:table-row table:style-name="Tabla12.1">
            <table:table-cell table:style-name="Tabla12.A1" office:value-type="string">
              <text:p text:style-name="P9" loext:marker-style-name="T5"><text:span text:style-name="T3">Número de veces que la empresa ha participado en Misiones</text:span><text:span text:style-name="T3"/></text:p>
              <text:p text:style-name="P10" loext:marker-style-name="T5"><text:span text:style-name="T3">Comerciales internacionales en los últimos 3 años.</text:span><text:span text:style-name="T3"/></text:p>
            </table:table-cell>
            <table:table-cell table:style-name="Tabla12.A1" office:value-type="string">
              <text:p text:style-name="P14" loext:marker-style-name="T5"><text:span text:style-name="T3">0</text:span><text:span text:style-name="T3"/></text:p>
            </table:table-cell>
          </table:table-row>
        </table:table>
        <text:p text:style-name="P37" loext:marker-style-name="T6"/>
        <table:table table:name="Tabla13" table:style-name="Tabla13">
          <table:table-column table:style-name="Tabla13.A"/>
          <table:table-column table:style-name="Tabla13.B"/>
          <table:table-row table:style-name="Tabla13.1">
            <table:table-cell table:style-name="Tabla13.A1" table:number-columns-spanned="2" office:value-type="string">
              <text:p text:style-name="P8" loext:marker-style-name="T5"><text:span text:style-name="T2">13. Coloque en el casillero el número de veces en las que ha participado la empresa en Ruedas de Negocios internacionales en los últimos 3 años.</text:span><text:span text:style-name="T2"/></text:p>
            </table:table-cell>
            <table:covered-table-cell/>
          </table:table-row>
          <table:table-row table:style-name="Tabla13.1">
            <table:table-cell table:style-name="Tabla13.A1" office:value-type="string">
              <text:p text:style-name="P9" loext:marker-style-name="T5"><text:span text:style-name="T3">Número de veces que la empresa ha participado en Ruedas de</text:span><text:span text:style-name="T3"/></text:p>
              <text:p text:style-name="P10" loext:marker-style-name="T5"><text:span text:style-name="T3">Negocios internacionales en los últimos 3 años.</text:span><text:span text:style-name="T3"/></text:p>
            </table:table-cell>
            <table:table-cell table:style-name="Tabla13.A1" office:value-type="string">
              <text:p text:style-name="P14" loext:marker-style-name="T5"><text:span text:style-name="T3">0</text:span><text:span text:style-name="T3"/></text:p>
            </table:table-cell>
          </table:table-row>
        </table:table>
        <text:p text:style-name="P37" loext:marker-style-name="T6"/>
        <table:table table:name="Tabla14" table:style-name="Tabla14">
          <table:table-column table:style-name="Tabla14.A"/>
          <table:table-column table:style-name="Tabla14.B"/>
          <table:table-column table:style-name="Tabla14.C"/>
          <table:table-column table:style-name="Tabla14.D"/>
          <table:table-column table:style-name="Tabla14.E"/>
          <text:soft-page-break/>
          <table:table-row table:style-name="Tabla14.1">
            <table:table-cell table:style-name="Tabla14.A1" office:value-type="string">
              <text:p text:style-name="P22" loext:marker-style-name="T5"><text:span text:style-name="T7">N°</text:span><text:span text:style-name="T7"/></text:p>
            </table:table-cell>
            <table:table-cell table:style-name="Tabla14.A1" office:value-type="string">
              <text:p text:style-name="P15" loext:marker-style-name="T5"><text:span text:style-name="T8">Criterios</text:span><text:span text:style-name="T8"/></text:p>
            </table:table-cell>
            <table:table-cell table:style-name="Tabla14.A1" office:value-type="string">
              <text:p text:style-name="P16" loext:marker-style-name="T5"><text:span text:style-name="T8">SI</text:span><text:span text:style-name="T8"/></text:p>
              <text:p text:style-name="P17" loext:marker-style-name="T5"><text:span text:style-name="T8">cumple</text:span><text:span text:style-name="T8"/></text:p>
            </table:table-cell>
            <table:table-cell table:style-name="Tabla14.A1" office:value-type="string">
              <text:p text:style-name="P18" loext:marker-style-name="T5"><text:span text:style-name="T8">No</text:span><text:span text:style-name="T8"/></text:p>
              <text:p text:style-name="P19" loext:marker-style-name="T5"><text:span text:style-name="T8">cumple</text:span><text:span text:style-name="T8"/></text:p>
            </table:table-cell>
            <table:table-cell table:style-name="Tabla14.A1" office:value-type="string">
              <text:p text:style-name="P23" loext:marker-style-name="T5"><text:span text:style-name="T8">Comentarios</text:span><text:span text:style-name="T8"/></text:p>
            </table:table-cell>
          </table:table-row>
          <table:table-row table:style-name="Tabla14.2">
            <table:table-cell table:style-name="Tabla14.A2" office:value-type="string">
              <text:p text:style-name="P24" loext:marker-style-name="T5"><text:span text:style-name="T3">1</text:span><text:span text:style-name="T3"/></text:p>
            </table:table-cell>
            <table:table-cell table:style-name="Tabla14.B2" office:value-type="string">
              <text:p text:style-name="P25" loext:marker-style-name="T5"><text:span text:style-name="T3">La materia prima es propia.</text:span><text:span text:style-name="T3"/></text:p>
            </table:table-cell>
            <table:table-cell table:style-name="Tabla14.C2" office:value-type="string">
              <text:p text:style-name="P14" loext:marker-style-name="T5"><text:span text:style-name="T3">X</text:span><text:span text:style-name="T3"/></text:p>
            </table:table-cell>
            <table:table-cell table:style-name="Tabla14.D2" office:value-type="string">
              <text:p text:style-name="P36" loext:marker-style-name="T6"/>
            </table:table-cell>
            <table:table-cell table:style-name="Tabla14.E2" office:value-type="string">
              <text:p text:style-name="P32" loext:marker-style-name="T5"><text:span text:style-name="T3">Más de 100 socios productores que brindan las 230 hectáreas</text:span><text:span text:style-name="T3"/></text:p>
            </table:table-cell>
          </table:table-row>
          <table:table-row table:style-name="Tabla14.2">
            <table:table-cell table:style-name="Tabla14.A3" office:value-type="string">
              <text:p text:style-name="P24" loext:marker-style-name="T5"><text:span text:style-name="T3">2</text:span><text:span text:style-name="T3"/></text:p>
            </table:table-cell>
            <table:table-cell table:style-name="Tabla14.B3" office:value-type="string">
              <text:p text:style-name="P25" loext:marker-style-name="T5"><text:span text:style-name="T3">Tienen planta de proceso.</text:span><text:span text:style-name="T3"/></text:p>
            </table:table-cell>
            <table:table-cell table:style-name="Tabla14.C3" office:value-type="string">
              <text:p text:style-name="P36" loext:marker-style-name="T6"/>
            </table:table-cell>
            <table:table-cell table:style-name="Tabla14.D3" office:value-type="string">
              <text:p text:style-name="P14" loext:marker-style-name="T5"><text:span text:style-name="T3">X</text:span><text:span text:style-name="T3"/></text:p>
            </table:table-cell>
            <table:table-cell table:style-name="Tabla14.E3" office:value-type="string">
              <text:p text:style-name="P32" loext:marker-style-name="T5"><text:span text:style-name="T3">Es tercerizada a una empresa</text:span><text:span text:style-name="T3"/></text:p>
            </table:table-cell>
          </table:table-row>
          <table:table-row table:style-name="Tabla14.2">
            <table:table-cell table:style-name="Tabla14.A4" office:value-type="string">
              <text:p text:style-name="P24" loext:marker-style-name="T5"><text:span text:style-name="T3">3</text:span><text:span text:style-name="T3"/></text:p>
            </table:table-cell>
            <table:table-cell table:style-name="Tabla14.B4" office:value-type="string">
              <text:p text:style-name="P25" loext:marker-style-name="T5"><text:span text:style-name="T3">Cuenta con un almacén</text:span><text:span text:style-name="T3"/></text:p>
            </table:table-cell>
            <table:table-cell table:style-name="Tabla14.C4" office:value-type="string">
              <text:p text:style-name="P14" loext:marker-style-name="T5"><text:span text:style-name="T3">X</text:span><text:span text:style-name="T3"/></text:p>
            </table:table-cell>
            <table:table-cell table:style-name="Tabla14.D4" office:value-type="string">
              <text:p text:style-name="P36" loext:marker-style-name="T6"/>
            </table:table-cell>
            <table:table-cell table:style-name="Tabla14.E4" office:value-type="string">
              <text:p text:style-name="P32" loext:marker-style-name="T5"><text:span text:style-name="T3">Acopios temporales: 7 subsectores</text:span><text:span text:style-name="T3"/></text:p>
            </table:table-cell>
          </table:table-row>
          <table:table-row table:style-name="Tabla14.5">
            <table:table-cell table:style-name="Tabla14.A5" office:value-type="string">
              <text:p text:style-name="P24" loext:marker-style-name="T5"><text:span text:style-name="T3">4</text:span><text:span text:style-name="T3"/></text:p>
            </table:table-cell>
            <table:table-cell table:style-name="Tabla14.B5" office:value-type="string">
              <text:p text:style-name="P26" loext:marker-style-name="T5"><text:span text:style-name="T3">Cuenta con equipo profesional para la</text:span><text:span text:style-name="T3"/></text:p>
              <text:p text:style-name="P27" loext:marker-style-name="T5"><text:span text:style-name="T3">exportación.</text:span><text:span text:style-name="T3"/></text:p>
            </table:table-cell>
            <table:table-cell table:style-name="Tabla14.C5" office:value-type="string">
              <text:p text:style-name="P36" loext:marker-style-name="T6"/>
            </table:table-cell>
            <table:table-cell table:style-name="Tabla14.D5" office:value-type="string">
              <text:p text:style-name="P14" loext:marker-style-name="T5"><text:span text:style-name="T3">X</text:span><text:span text:style-name="T3"/></text:p>
            </table:table-cell>
            <table:table-cell table:style-name="Tabla14.E5" office:value-type="string">
              <text:p text:style-name="P36" loext:marker-style-name="T6"/>
            </table:table-cell>
          </table:table-row>
          <table:table-row table:style-name="Tabla14.2">
            <table:table-cell table:style-name="Tabla14.A6" office:value-type="string">
              <text:p text:style-name="P24" loext:marker-style-name="T5"><text:span text:style-name="T3">5</text:span><text:span text:style-name="T3"/></text:p>
            </table:table-cell>
            <table:table-cell table:style-name="Tabla14.B6" office:value-type="string">
              <text:p text:style-name="P25" loext:marker-style-name="T5"><text:span text:style-name="T3">Tienen Plan HACCP aprobado</text:span><text:span text:style-name="T3"/></text:p>
            </table:table-cell>
            <table:table-cell table:style-name="Tabla14.C6" office:value-type="string">
              <text:p text:style-name="P36" loext:marker-style-name="T6"/>
            </table:table-cell>
            <table:table-cell table:style-name="Tabla14.D6" office:value-type="string">
              <text:p text:style-name="P14" loext:marker-style-name="T5"><text:span text:style-name="T3">X</text:span><text:span text:style-name="T3"/></text:p>
            </table:table-cell>
            <table:table-cell table:style-name="Tabla14.E6" office:value-type="string">
              <text:p text:style-name="P32" loext:marker-style-name="T5"><text:span text:style-name="T3">Aplicado para planta</text:span><text:span text:style-name="T3"/></text:p>
            </table:table-cell>
          </table:table-row>
          <table:table-row table:style-name="Tabla14.1">
            <table:table-cell table:style-name="Tabla14.A7" office:value-type="string">
              <text:p text:style-name="P24" loext:marker-style-name="T5"><text:span text:style-name="T3">6</text:span><text:span text:style-name="T3"/></text:p>
            </table:table-cell>
            <table:table-cell table:style-name="Tabla14.B7" office:value-type="string">
              <text:p text:style-name="P25" loext:marker-style-name="T5"><text:span text:style-name="T3">Cuentan con maquinaria</text:span><text:span text:style-name="T3"/></text:p>
              <text:p text:style-name="P28" loext:marker-style-name="T5"><text:span text:style-name="T3">(tecnología) para el proceso</text:span><text:span text:style-name="T3"/></text:p>
            </table:table-cell>
            <table:table-cell table:style-name="Tabla14.C7" office:value-type="string">
              <text:p text:style-name="P36" loext:marker-style-name="T6"/>
            </table:table-cell>
            <table:table-cell table:style-name="Tabla14.D7" office:value-type="string">
              <text:p text:style-name="P14" loext:marker-style-name="T5"><text:span text:style-name="T3">X</text:span><text:span text:style-name="T3"/></text:p>
            </table:table-cell>
            <table:table-cell table:style-name="Tabla14.E7" office:value-type="string">
              <text:p text:style-name="P36" loext:marker-style-name="T6"/>
            </table:table-cell>
          </table:table-row>
          <table:table-row table:style-name="Tabla14.2">
            <table:table-cell table:style-name="Tabla14.A8" office:value-type="string">
              <text:p text:style-name="P24" loext:marker-style-name="T5"><text:span text:style-name="T3">7</text:span><text:span text:style-name="T3"/></text:p>
            </table:table-cell>
            <table:table-cell table:style-name="Tabla14.B8" office:value-type="string">
              <text:p text:style-name="P25" loext:marker-style-name="T5"><text:span text:style-name="T3">Cuenta con transporte propio</text:span><text:span text:style-name="T3"/></text:p>
            </table:table-cell>
            <table:table-cell table:style-name="Tabla14.C8" office:value-type="string">
              <text:p text:style-name="P14" loext:marker-style-name="T5"><text:span text:style-name="T3">X</text:span><text:span text:style-name="T3"/></text:p>
            </table:table-cell>
            <table:table-cell table:style-name="Tabla14.D8" office:value-type="string">
              <text:p text:style-name="P36" loext:marker-style-name="T6"/>
            </table:table-cell>
            <table:table-cell table:style-name="Tabla14.E8" office:value-type="string">
              <text:p text:style-name="P32" loext:marker-style-name="T5"><text:span text:style-name="T3">De los socios-productores: Camiones pequeños</text:span><text:span text:style-name="T3"/></text:p>
            </table:table-cell>
          </table:table-row>
          <table:table-row table:style-name="Tabla14.1">
            <table:table-cell table:style-name="Tabla14.A9" office:value-type="string">
              <text:p text:style-name="P24" loext:marker-style-name="T5"><text:span text:style-name="T3">8</text:span><text:span text:style-name="T3"/></text:p>
            </table:table-cell>
            <table:table-cell table:style-name="Tabla14.B9" office:value-type="string">
              <text:p text:style-name="P25" loext:marker-style-name="T5"><text:span text:style-name="T3">Tienen sistema de</text:span><text:span text:style-name="T3"/></text:p>
              <text:p text:style-name="P28" loext:marker-style-name="T5"><text:span text:style-name="T3">trazabilidad</text:span><text:span text:style-name="T3"/></text:p>
            </table:table-cell>
            <table:table-cell table:style-name="Tabla14.C9" office:value-type="string">
              <text:p text:style-name="P14" loext:marker-style-name="T5"><text:span text:style-name="T3">X</text:span><text:span text:style-name="T3"/></text:p>
            </table:table-cell>
            <table:table-cell table:style-name="Tabla14.D9" office:value-type="string">
              <text:p text:style-name="P36" loext:marker-style-name="T6"/>
            </table:table-cell>
            <table:table-cell table:style-name="Tabla14.E9" office:value-type="string">
              <text:p text:style-name="P32" loext:marker-style-name="T5"><text:span text:style-name="T3">Desde la producción de campo hasta su entrega</text:span><text:span text:style-name="T3"/></text:p>
            </table:table-cell>
          </table:table-row>
          <table:table-row table:style-name="Tabla14.5">
            <table:table-cell table:style-name="Tabla14.A10" office:value-type="string">
              <text:p text:style-name="P24" loext:marker-style-name="T5"><text:span text:style-name="T3">9</text:span><text:span text:style-name="T3"/></text:p>
            </table:table-cell>
            <table:table-cell table:style-name="Tabla14.B10" office:value-type="string">
              <text:p text:style-name="P29" loext:marker-style-name="T5"><text:span text:style-name="T3">Tienen proveedores calificados de la materia</text:span><text:span text:style-name="T3"/></text:p>
              <text:p text:style-name="P27" loext:marker-style-name="T5"><text:span text:style-name="T3">prima</text:span><text:span text:style-name="T3"/></text:p>
            </table:table-cell>
            <table:table-cell table:style-name="Tabla14.C10" office:value-type="string">
              <text:p text:style-name="P14" loext:marker-style-name="T5"><text:span text:style-name="T3">X</text:span><text:span text:style-name="T3"/></text:p>
            </table:table-cell>
            <table:table-cell table:style-name="Tabla14.D10" office:value-type="string">
              <text:p text:style-name="P36" loext:marker-style-name="T6"/>
            </table:table-cell>
            <table:table-cell table:style-name="Tabla14.E10" office:value-type="string">
              <text:p text:style-name="P36" loext:marker-style-name="T6"/>
            </table:table-cell>
          </table:table-row>
          <table:table-row table:style-name="Tabla14.1">
            <table:table-cell table:style-name="Tabla14.A11" office:value-type="string">
              <text:p text:style-name="P24" loext:marker-style-name="T5"><text:span text:style-name="T3">10</text:span><text:span text:style-name="T3"/></text:p>
            </table:table-cell>
            <table:table-cell table:style-name="Tabla14.B11" office:value-type="string">
              <text:p text:style-name="P25" loext:marker-style-name="T5"><text:span text:style-name="T3">Cuentan con certificaciones</text:span><text:span text:style-name="T3"/></text:p>
              <text:p text:style-name="P28" loext:marker-style-name="T5"><text:span text:style-name="T3">internacionales</text:span><text:span text:style-name="T3"/></text:p>
            </table:table-cell>
            <table:table-cell table:style-name="Tabla14.C11" office:value-type="string">
              <text:p text:style-name="P14" loext:marker-style-name="T5"><text:span text:style-name="T3">X</text:span><text:span text:style-name="T3"/></text:p>
            </table:table-cell>
            <table:table-cell table:style-name="Tabla14.D11" office:value-type="string">
              <text:p text:style-name="P37" loext:marker-style-name="T6"/>
            </table:table-cell>
            <table:table-cell table:style-name="Tabla14.E11" office:value-type="string">
              <text:p text:style-name="P36" loext:marker-style-name="T6"/>
            </table:table-cell>
          </table:table-row>
          <table:table-row table:style-name="Tabla14.1">
            <table:table-cell table:style-name="Tabla14.A12" office:value-type="string">
              <text:p text:style-name="P24" loext:marker-style-name="T5"><text:span text:style-name="T3">11</text:span><text:span text:style-name="T3"/></text:p>
            </table:table-cell>
            <table:table-cell table:style-name="Tabla14.B12" office:value-type="string">
              <text:p text:style-name="P25" loext:marker-style-name="T5"><text:span text:style-name="T3">Cuenta con brochure</text:span><text:span text:style-name="T3"/></text:p>
              <text:p text:style-name="P30" loext:marker-style-name="T5"><text:span text:style-name="T3">actualizado</text:span><text:span text:style-name="T3"/></text:p>
            </table:table-cell>
            <table:table-cell table:style-name="Tabla14.C12" office:value-type="string">
              <text:p text:style-name="P36" loext:marker-style-name="T6"/>
            </table:table-cell>
            <table:table-cell table:style-name="Tabla14.D12" office:value-type="string">
              <text:p text:style-name="P14" loext:marker-style-name="T5"><text:span text:style-name="T3">X</text:span><text:span text:style-name="T3"/></text:p>
            </table:table-cell>
            <table:table-cell table:style-name="Tabla14.E12" office:value-type="string">
              <text:p text:style-name="P32" loext:marker-style-name="T5"><text:span text:style-name="T3">En web, no físico ni elaborado</text:span><text:span text:style-name="T3"/></text:p>
            </table:table-cell>
          </table:table-row>
          <table:table-row table:style-name="Tabla14.2">
            <table:table-cell table:style-name="Tabla14.A13" office:value-type="string">
              <text:p text:style-name="P24" loext:marker-style-name="T5"><text:span text:style-name="T3">12</text:span><text:span text:style-name="T3"/></text:p>
            </table:table-cell>
            <table:table-cell table:style-name="Tabla14.B13" office:value-type="string">
              <text:p text:style-name="P25" loext:marker-style-name="T5"><text:span text:style-name="T3">Cuenta con Página Web</text:span><text:span text:style-name="T3"/></text:p>
            </table:table-cell>
            <table:table-cell table:style-name="Tabla14.C13" office:value-type="string">
              <text:p text:style-name="P14" loext:marker-style-name="T5"><text:span text:style-name="T3">X</text:span><text:span text:style-name="T3"/></text:p>
            </table:table-cell>
            <table:table-cell table:style-name="Tabla14.D13" office:value-type="string">
              <text:p text:style-name="P36" loext:marker-style-name="T6"/>
            </table:table-cell>
            <table:table-cell table:style-name="Tabla14.E13" office:value-type="string">
              <text:p text:style-name="P36" loext:marker-style-name="T6"/>
            </table:table-cell>
          </table:table-row>
          <table:table-row table:style-name="Tabla14.2">
            <table:table-cell table:style-name="Tabla14.A14" office:value-type="string">
              <text:p text:style-name="P24" loext:marker-style-name="T5"><text:span text:style-name="T3">13</text:span><text:span text:style-name="T3"/></text:p>
            </table:table-cell>
            <table:table-cell table:style-name="Tabla14.B14" office:value-type="string">
              <text:p text:style-name="P25" loext:marker-style-name="T5"><text:span text:style-name="T3">Cuenta con Fan Page</text:span><text:span text:style-name="T3"/></text:p>
            </table:table-cell>
            <table:table-cell table:style-name="Tabla14.C14" office:value-type="string">
              <text:p text:style-name="P14" loext:marker-style-name="T5"><text:span text:style-name="T3">X</text:span><text:span text:style-name="T3"/></text:p>
            </table:table-cell>
            <table:table-cell table:style-name="Tabla14.D14" office:value-type="string">
              <text:p text:style-name="P36" loext:marker-style-name="T6"/>
            </table:table-cell>
            <table:table-cell table:style-name="Tabla14.E14" office:value-type="string">
              <text:p text:style-name="P32" loext:marker-style-name="T5"><text:span text:style-name="T3">Facebook</text:span><text:span text:style-name="T3"/></text:p>
            </table:table-cell>
          </table:table-row>
          <table:table-row table:style-name="Tabla14.1">
            <table:table-cell table:style-name="Tabla14.A15" office:value-type="string">
              <text:p text:style-name="P24" loext:marker-style-name="T5"><text:span text:style-name="T3">14</text:span><text:span text:style-name="T3"/></text:p>
            </table:table-cell>
            <table:table-cell table:style-name="Tabla14.B15" office:value-type="string">
              <text:p text:style-name="P25" loext:marker-style-name="T5"><text:span text:style-name="T3">Cuenta con ficha técnica del</text:span><text:span text:style-name="T3"/></text:p>
              <text:p text:style-name="P28" loext:marker-style-name="T5"><text:span text:style-name="T3">producto.</text:span><text:span text:style-name="T3"/></text:p>
            </table:table-cell>
            <table:table-cell table:style-name="Tabla14.C15" office:value-type="string">
              <text:p text:style-name="P14" loext:marker-style-name="T5"><text:span text:style-name="T3">X</text:span><text:span text:style-name="T3"/></text:p>
            </table:table-cell>
            <table:table-cell table:style-name="Tabla14.D15" office:value-type="string">
              <text:p text:style-name="P36" loext:marker-style-name="T6"/>
            </table:table-cell>
            <table:table-cell table:style-name="Tabla14.E15" office:value-type="string">
              <text:p text:style-name="P32" loext:marker-style-name="T5"><text:span text:style-name="T3">Esparrago verde en conserva /</text:span></text:p>
              <text:p text:style-name="P32" loext:marker-style-name="T5"><text:span text:style-name="T3">Quinua (Falta de esparrago fresco)</text:span><text:span text:style-name="T3"/></text:p>
            </table:table-cell>
          </table:table-row>
          <table:table-row table:style-name="Tabla14.1">
            <table:table-cell table:style-name="Tabla14.A16" office:value-type="string">
              <text:p text:style-name="P24" loext:marker-style-name="T5"><text:span text:style-name="T3">15</text:span><text:span text:style-name="T3"/></text:p>
            </table:table-cell>
            <table:table-cell table:style-name="Tabla14.B16" office:value-type="string">
              <text:p text:style-name="P25" loext:marker-style-name="T5"><text:span text:style-name="T3">Anteriormente han realizado</text:span><text:span text:style-name="T3"/></text:p>
              <text:p text:style-name="P30" loext:marker-style-name="T5"><text:span text:style-name="T3">un estudio de mercado</text:span><text:span text:style-name="T3"/></text:p>
            </table:table-cell>
            <table:table-cell table:style-name="Tabla14.C16" office:value-type="string">
              <text:p text:style-name="P36" loext:marker-style-name="T6"/>
            </table:table-cell>
            <table:table-cell table:style-name="Tabla14.D16" office:value-type="string">
              <text:p text:style-name="P14" loext:marker-style-name="T5"><text:span text:style-name="T3">X</text:span><text:span text:style-name="T3"/></text:p>
            </table:table-cell>
            <table:table-cell table:style-name="Tabla14.E16" office:value-type="string">
              <text:p text:style-name="P32" loext:marker-style-name="T5"><text:span text:style-name="T3">Solo de costo de maquila, materiales, costo logístico</text:span><text:span text:style-name="T3"/></text:p>
            </table:table-cell>
          </table:table-row>
          <table:table-row table:style-name="Tabla14.1">
            <table:table-cell table:style-name="Tabla14.A17" office:value-type="string">
              <text:p text:style-name="P24" loext:marker-style-name="T5"><text:span text:style-name="T3">16</text:span><text:span text:style-name="T3"/></text:p>
            </table:table-cell>
            <table:table-cell table:style-name="Tabla14.B17" office:value-type="string">
              <text:p text:style-name="P25" loext:marker-style-name="T5"><text:span text:style-name="T3">Cuenta con el etiquetado del</text:span><text:span text:style-name="T3"/></text:p>
              <text:p text:style-name="P28" loext:marker-style-name="T5"><text:span text:style-name="T3">producto</text:span><text:span text:style-name="T3"/></text:p>
            </table:table-cell>
            <table:table-cell table:style-name="Tabla14.C17" office:value-type="string">
              <text:p text:style-name="P37" loext:marker-style-name="T6"/>
            </table:table-cell>
            <table:table-cell table:style-name="Tabla14.D17" office:value-type="string">
              <text:p text:style-name="P14" loext:marker-style-name="T5"><text:span text:style-name="T3">X</text:span><text:span text:style-name="T3"/></text:p>
            </table:table-cell>
            <table:table-cell table:style-name="Tabla14.E17" office:value-type="string">
              <text:p text:style-name="P32" loext:marker-style-name="T5"><text:span text:style-name="T3">Virú S.A: se encarga de todo el etiquetado, solo lo mandan con el sello de Fairtrade</text:span><text:span text:style-name="T3"/></text:p>
            </table:table-cell>
          </table:table-row>
          <table:table-row table:style-name="Tabla14.2">
            <table:table-cell table:style-name="Tabla14.A18" office:value-type="string">
              <text:p text:style-name="P24" loext:marker-style-name="T5"><text:span text:style-name="T3">17</text:span><text:span text:style-name="T3"/></text:p>
            </table:table-cell>
            <table:table-cell table:style-name="Tabla14.B18" office:value-type="string">
              <text:p text:style-name="P25" loext:marker-style-name="T5"><text:span text:style-name="T3">Cuentan con marca</text:span><text:span text:style-name="T3"/></text:p>
            </table:table-cell>
            <table:table-cell table:style-name="Tabla14.C18" office:value-type="string">
              <text:p text:style-name="P14" loext:marker-style-name="T5"><text:span text:style-name="T3">X</text:span><text:span text:style-name="T3"/></text:p>
            </table:table-cell>
            <table:table-cell table:style-name="Tabla14.D18" office:value-type="string">
              <text:p text:style-name="P36" loext:marker-style-name="T6"/>
            </table:table-cell>
            <table:table-cell table:style-name="Tabla14.E18" office:value-type="string">
              <text:p text:style-name="P32" loext:marker-style-name="T5"><text:span text:style-name="T3">Coavaje</text:span><text:span text:style-name="T3"/></text:p>
            </table:table-cell>
          </table:table-row>
          <table:table-row table:style-name="Tabla14.1">
            <table:table-cell table:style-name="Tabla14.A19" office:value-type="string">
              <text:p text:style-name="P24" loext:marker-style-name="T5"><text:span text:style-name="T3">18</text:span><text:span text:style-name="T3"/></text:p>
            </table:table-cell>
            <table:table-cell table:style-name="Tabla14.B19" office:value-type="string">
              <text:p text:style-name="P25" loext:marker-style-name="T5"><text:span text:style-name="T3">Tienen marca registrada en</text:span><text:span text:style-name="T3"/></text:p>
              <text:p text:style-name="P28" loext:marker-style-name="T5"><text:span text:style-name="T3">Perú</text:span><text:span text:style-name="T3"/></text:p>
            </table:table-cell>
            <table:table-cell table:style-name="Tabla14.C19" office:value-type="string">
              <text:p text:style-name="P14" loext:marker-style-name="T5"><text:span text:style-name="T3">X</text:span><text:span text:style-name="T3"/></text:p>
            </table:table-cell>
            <table:table-cell table:style-name="Tabla14.D19" office:value-type="string">
              <text:p text:style-name="P36" loext:marker-style-name="T6"/>
            </table:table-cell>
            <table:table-cell table:style-name="Tabla14.E19" office:value-type="string">
              <text:p text:style-name="P32" loext:marker-style-name="T5"><text:span text:style-name="T3">En Indecopi</text:span><text:span text:style-name="T3"/></text:p>
            </table:table-cell>
          </table:table-row>
          <table:table-row table:style-name="Tabla14.1">
            <table:table-cell table:style-name="Tabla14.A20" office:value-type="string">
              <text:p text:style-name="P24" loext:marker-style-name="T5"><text:span text:style-name="T3">19</text:span><text:span text:style-name="T3"/></text:p>
            </table:table-cell>
            <table:table-cell table:style-name="Tabla14.B20" office:value-type="string">
              <text:p text:style-name="P25" loext:marker-style-name="T5"><text:span text:style-name="T3">Tienen marca registrada en</text:span><text:span text:style-name="T3"/></text:p>
              <text:p text:style-name="P28" loext:marker-style-name="T5"><text:span text:style-name="T3">otros países.</text:span><text:span text:style-name="T3"/></text:p>
            </table:table-cell>
            <table:table-cell table:style-name="Tabla14.C20" office:value-type="string">
              <text:p text:style-name="P36" loext:marker-style-name="T6"/>
            </table:table-cell>
            <table:table-cell table:style-name="Tabla14.D20" office:value-type="string">
              <text:p text:style-name="P14" loext:marker-style-name="T5"><text:span text:style-name="T3">X</text:span><text:span text:style-name="T3"/></text:p>
            </table:table-cell>
            <table:table-cell table:style-name="Tabla14.E20" office:value-type="string">
              <text:p text:style-name="P36" loext:marker-style-name="T6"/>
            </table:table-cell>
          </table:table-row>
          <table:table-row table:style-name="Tabla14.1">
            <table:table-cell table:style-name="Tabla14.A21" office:value-type="string">
              <text:p text:style-name="P24" loext:marker-style-name="T5"><text:span text:style-name="T3">20</text:span><text:span text:style-name="T3"/></text:p>
            </table:table-cell>
            <table:table-cell table:style-name="Tabla14.B21" office:value-type="string">
              <text:p text:style-name="P25" loext:marker-style-name="T5"><text:span text:style-name="T3">Conoce los requisitos técnicos</text:span><text:span text:style-name="T3"/></text:p>
              <text:p text:style-name="P28" loext:marker-style-name="T5"><text:span text:style-name="T3">de acceso sobre su producto</text:span><text:span text:style-name="T3"/></text:p>
            </table:table-cell>
            <table:table-cell table:style-name="Tabla14.C21" office:value-type="string">
              <text:p text:style-name="P14" loext:marker-style-name="T5"><text:span text:style-name="T3">X</text:span><text:span text:style-name="T3"/></text:p>
            </table:table-cell>
            <table:table-cell table:style-name="Tabla14.D21" office:value-type="string">
              <text:p text:style-name="P36" loext:marker-style-name="T6"/>
            </table:table-cell>
            <table:table-cell table:style-name="Tabla14.E21" office:value-type="string">
              <text:p text:style-name="P32" loext:marker-style-name="T5"><text:span text:style-name="T3">Sobre las plantas, condiciones y características físicas</text:span><text:span text:style-name="T3"/></text:p>
            </table:table-cell>
          </table:table-row>
          <table:table-row table:style-name="Tabla14.1">
            <table:table-cell table:style-name="Tabla14.A22" office:value-type="string">
              <text:p text:style-name="P24" loext:marker-style-name="T5"><text:span text:style-name="T3">21</text:span><text:span text:style-name="T3"/></text:p>
            </table:table-cell>
            <table:table-cell table:style-name="Tabla14.B22" office:value-type="string">
              <text:p text:style-name="P25" loext:marker-style-name="T5"><text:span text:style-name="T3">Tiene acceso a bases de datos</text:span><text:span text:style-name="T3"/></text:p>
              <text:p text:style-name="P28" loext:marker-style-name="T5"><text:span text:style-name="T3">pagadas</text:span><text:span text:style-name="T3"/></text:p>
            </table:table-cell>
            <table:table-cell table:style-name="Tabla14.C22" office:value-type="string">
              <text:p text:style-name="P36" loext:marker-style-name="T6"/>
            </table:table-cell>
            <table:table-cell table:style-name="Tabla14.D22" office:value-type="string">
              <text:p text:style-name="P14" loext:marker-style-name="T5"><text:span text:style-name="T3">X</text:span><text:span text:style-name="T3"/></text:p>
            </table:table-cell>
            <table:table-cell table:style-name="Tabla14.E22" office:value-type="string">
              <text:p text:style-name="P32" loext:marker-style-name="T5"><text:span text:style-name="T3">Al ser socios de la CCLL pueden solicitar datos de DataTrade</text:span><text:span text:style-name="T3"/></text:p>
            </table:table-cell>
          </table:table-row>
          <table:table-row table:style-name="Tabla14.5">
            <table:table-cell table:style-name="Tabla14.A23" office:value-type="string">
              <text:p text:style-name="P24" loext:marker-style-name="T5"><text:span text:style-name="T3">22</text:span><text:span text:style-name="T3"/></text:p>
            </table:table-cell>
            <table:table-cell table:style-name="Tabla14.B23" office:value-type="string">
              <text:p text:style-name="P31" loext:marker-style-name="T5"><text:span text:style-name="T3">Es socio de alguna institución que promueve las</text:span><text:span text:style-name="T3"/></text:p>
              <text:p text:style-name="P27" loext:marker-style-name="T5"><text:span text:style-name="T3">exportaciones</text:span><text:span text:style-name="T3"/></text:p>
            </table:table-cell>
            <table:table-cell table:style-name="Tabla14.C23" office:value-type="string">
              <text:p text:style-name="P14" loext:marker-style-name="T5"><text:span text:style-name="T3">X</text:span><text:span text:style-name="T3"/></text:p>
            </table:table-cell>
            <table:table-cell table:style-name="Tabla14.D23" office:value-type="string">
              <text:p text:style-name="P36" loext:marker-style-name="T6"/>
            </table:table-cell>
            <table:table-cell table:style-name="Tabla14.E23" office:value-type="string">
              <text:p text:style-name="P32" loext:marker-style-name="T5"><text:span text:style-name="T3">Adex (a través de la CCLL) y socios de la CCLL</text:span><text:span text:style-name="T3"/></text:p>
            </table:table-cell>
          </table:table-row>
        </table:table>
        <text:p text:style-name="P7" loext:marker-style-name="T5"><text:span text:style-name="T1"><text:s/></text:span><text:span text:style-name="T1"/></text:p>
        <text:p text:style-name="P33" loext:marker-style-name="T5"><text:span text:style-name="T1">3. FODA</text:span><text:span text:style-name="T1"/></text:p>
        <text:p text:style-name="P34" loext:marker-style-name="T5"><text:span text:style-name="T4">En base a la conversación con el empresario - el grupo de alumno va comentando el análisis FODA de la empresa, de tal manera que empresario pueda dar su opinión al respecto.</text:span><text:span text:style-name="T4"/></text:p>
        <text:p text:style-name="P34" loext:marker-style-name="T5"><text:span text:style-name="T4">Ejemplo:</text:span><text:span text:style-name="T4"/></text:p>
        <text:p text:style-name="P7" loext:marker-style-name="T5"><text:span text:style-name="T1">Fortalezas:</text:span><text:span text:style-name="T1"/></text:p>
        <text:p text:style-name="P7" loext:marker-style-name="T5"><text:span text:style-name="T4">F1 Tierras de producción propia de la materia prima. F2 Alianza estratégica con los más de 100 socios. F3 Certificaciones internacionales: Global Gap y Fairtrade. F4 Socios-productores comprometidos con la empresa.</text:span><text:span text:style-name="T4"/></text:p>
        <text:p text:style-name="P7" loext:marker-style-name="T5"><text:span text:style-name="T1">Oportunidades:</text:span><text:span text:style-name="T1"/></text:p>
        <text:p text:style-name="P35" loext:marker-style-name="T5"><text:span text:style-name="T4">O1 Tratados comerciales vigentes con los principales países destino.</text:span><text:span text:style-name="T4"/></text:p>
        <text:p text:style-name="P35" loext:marker-style-name="T5"><text:span text:style-name="T4">O2 El comercio justo es valorado en mercados globales.</text:span><text:span text:style-name="T4"/></text:p>
        <text:p text:style-name="P35" loext:marker-style-name="T5"><text:span text:style-name="T4">O3 Tendencia a la exportación de espárrago fresco frente al en conserva.</text:span><text:span text:style-name="T4"/></text:p>
        <text:p text:style-name="P7" loext:marker-style-name="T5"><text:span text:style-name="T4">O4 Colaboración de Senasa para certificación sanitaria y fitosanitaria con mayor facilidad para exportadores de espárragos.</text:span><text:span text:style-name="T4"/></text:p>
        <text:p text:style-name="P7" loext:marker-style-name="T5"><text:span text:style-name="T1">Debilidades:</text:span><text:span text:style-name="T1"/></text:p>
        <text:p text:style-name="P7" loext:marker-style-name="T5"><text:span text:style-name="T4">D1 Su producto es exportado mediante muchos intermediarios.</text:span><text:span text:style-name="T4"/></text:p>
        <text:p text:style-name="P7" loext:marker-style-name="T5"><text:span text:style-name="T4"><text:s/>D2 Infraestructura y mano de obra depende de los socios-productores.</text:span><text:span text:style-name="T4"/></text:p>
        <text:p text:style-name="P7" loext:marker-style-name="T5"><text:span text:style-name="T4"><text:s/>D3 No tienen área especializada para la exportación y estudio de mercados internacionales.</text:span><text:span text:style-name="T4"/></text:p>
        <text:p text:style-name="P7" loext:marker-style-name="T5"><text:span text:style-name="T4"><text:s/>D4 No cuentan con herramientas pagadas de inteligencia comercial.</text:span><text:span text:style-name="T4"/></text:p>
        <text:p text:style-name="P7" loext:marker-style-name="T5"><text:span text:style-name="T1">Amenazas:</text:span><text:span text:style-name="T1"/></text:p>
        <text:p text:style-name="P7" loext:marker-style-name="T5"><text:span text:style-name="T4">A1 Fuertes barreras no arancelarias en los principales países destino.</text:span><text:span text:style-name="T4"/></text:p>
        <text:p text:style-name="P7" loext:marker-style-name="T5"><text:span text:style-name="T4">A2 Guerra comercial China-USA y posible recesión de la economía.</text:span><text:span text:style-name="T4"/></text:p>
        <text:p text:style-name="P7" loext:marker-style-name="T5"><text:span text:style-name="T4">A3 Mucha competencia con agroexportadoras de la localidad.</text:span><text:span text:style-name="T4"/></text:p>
        <text:p text:style-name="P7" loext:marker-style-name="T5"><text:soft-page-break/><text:span text:style-name="T4">A4 Los fenómenos climáticos en la región han causado pérdidas de mercadería </text:span><text:span text:style-name="T4"/></text:p>
        <text:p text:style-name="P7" loext:marker-style-name="T5"><text:span text:style-name="T4">en años anteriores y pueden seguir afectando con mayor impacto.</text:span><text:span text:style-name="T4"/></text:p>
        <text:p text:style-name="P38" loext:marker-style-name="T4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Georgia" svg:font-family="Georgia" style:font-family-generic="roman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PE" style:letter-kerning="false" style:font-name-asian="Calibri1" style:font-size-asian="11pt" style:language-asian="es" style:country-asian="PE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PE" style:letter-kerning="false" style:font-name-asian="Calibri1" style:font-size-asian="11pt" style:language-asian="es" style:country-asian="PE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fo:font-size="11pt" fo:language="es" fo:country="PE" style:letter-kerning="false" style:font-name-asian="Calibri1" style:font-family-asian="Calibri" style:font-family-generic-asian="system" style:font-pitch-asian="variable" style:font-size-asian="11pt" style:language-asian="es" style:country-asian="PE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loext:linked-style-name="Título_20_1_20_Car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loext:linked-style-name="Título_20_2_20_C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PE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PE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pple-tab-span" style:family="text" style:parent-style-name="Default_20_Paragraph_20_Font"/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9T22:08:00</meta:creation-date>
    <meta:initial-creator>Angel Rojas</meta:initial-creator>
    <dc:language>es-PE</dc:language>
    <dc:creator>Elmer Edison Achalma Mendoza</dc:creator>
    <dc:date>2023-12-31T17:24:47</dc:date>
    <meta:editing-cycles>3</meta:editing-cycles>
    <meta:editing-duration>PT2H1M</meta:editing-duration>
    <meta:generator>LibreOffice/24.2.4.2$Linux_X86_64 LibreOffice_project/420$Build-2</meta:generator>
    <meta:document-statistic meta:table-count="14" meta:image-count="0" meta:object-count="0" meta:page-count="6" meta:paragraph-count="230" meta:word-count="1079" meta:character-count="6562" meta:non-whitespace-character-count="5700"/>
    <meta:user-defined meta:name="AppVersion">15.0000</meta:user-defined>
    <meta:template xlink:type="simple" xlink:actuate="onRequest" xlink:title="Normal" xlink:href=""/>
  </office:meta>
</office:document-meta>
</file>