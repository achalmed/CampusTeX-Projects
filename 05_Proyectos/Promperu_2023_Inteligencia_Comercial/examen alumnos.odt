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4000002B9EE6673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entury Gothic" svg:font-family="'Century Gothic'" style:font-family-generic="roman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line-height="113%"/>
    </style:style>
    <style:style style:name="P2" style:family="paragraph" style:parent-style-name="Frame_20_contents">
      <style:paragraph-properties fo:line-height="113%" fo:text-align="justify" style:justify-single-word="false"/>
    </style:style>
    <style:style style:name="P3" style:family="paragraph" style:parent-style-name="Frame_20_contents">
      <style:paragraph-properties fo:text-align="justify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List_20_Paragraph" style:list-style-name="WWNum2">
      <style:paragraph-properties fo:margin-left="1cm" fo:margin-top="0cm" fo:margin-bottom="0.353cm" style:contextual-spacing="true" fo:line-height="200%" fo:text-indent="-0.499cm" style:auto-text-indent="false">
        <style:tab-stops>
          <style:tab-stop style:position="5.186cm"/>
        </style:tab-stops>
      </style:paragraph-properties>
    </style:style>
    <style:style style:name="P6" style:family="paragraph" style:parent-style-name="Standard">
      <style:paragraph-properties fo:margin-top="0.212cm" fo:margin-bottom="0cm" style:contextual-spacing="false" fo:line-height="200%" fo:text-align="center" style:justify-single-word="false"/>
    </style:style>
    <style:style style:name="P7" style:family="paragraph" style:parent-style-name="Standard" style:master-page-name="Standard">
      <style:paragraph-properties fo:margin-top="0.212cm" fo:margin-bottom="0cm" style:contextual-spacing="false" fo:line-height="200%" fo:text-align="center" style:justify-single-word="false" style:page-number="1"/>
    </style:style>
    <style:style style:name="P8" style:family="paragraph" style:parent-style-name="Standard">
      <style:paragraph-properties fo:line-height="200%"/>
    </style:style>
    <style:style style:name="P9" style:family="paragraph" style:parent-style-name="Standard" style:list-style-name="WWNum1">
      <style:paragraph-properties fo:margin-left="0.751cm" fo:margin-top="0cm" fo:margin-bottom="0.353cm" style:contextual-spacing="true" fo:line-height="200%" fo:text-indent="-0.751cm" style:auto-text-indent="false">
        <style:tab-stops>
          <style:tab-stop style:position="5.186cm"/>
        </style:tab-stops>
      </style:paragraph-properties>
    </style:style>
    <style:style style:name="P10" style:family="paragraph" style:parent-style-name="Standard">
      <style:paragraph-properties fo:margin-top="0cm" fo:margin-bottom="0.353cm" style:contextual-spacing="false" fo:line-height="200%">
        <style:tab-stops>
          <style:tab-stop style:position="5.186cm"/>
        </style:tab-stops>
      </style:paragraph-properties>
    </style:style>
    <style:style style:name="P11" style:family="paragraph" style:parent-style-name="Standard">
      <style:paragraph-properties fo:line-height="200%" fo:text-align="justify" style:justify-single-word="false">
        <style:tab-stops>
          <style:tab-stop style:position="5.186cm"/>
        </style:tab-stops>
      </style:paragraph-properties>
    </style:style>
    <style:style style:name="P12" style:family="paragraph" style:parent-style-name="Standard">
      <style:paragraph-properties fo:margin-top="0cm" fo:margin-bottom="0.353cm" style:contextual-spacing="true" fo:line-height="200%">
        <style:tab-stops>
          <style:tab-stop style:position="5.186cm"/>
        </style:tab-stops>
      </style:paragraph-properties>
      <style:text-properties style:font-name="Times New Roman" fo:font-size="12pt" fo:font-weight="bold" style:font-name-asian="Century Gothic1" style:font-size-asian="12pt" style:font-weight-asian="bold" style:font-name-complex="Century Gothic1" style:font-size-complex="12pt"/>
    </style:style>
    <style:style style:name="P13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color="#000000" loext:opacity="100%" fo:font-size="18pt"/>
    </style:style>
    <style:style style:name="P15" style:family="paragraph">
      <loext:graphic-properties draw:fill="solid" draw:fill-color="#f2f2f2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" fo:font-size="12pt" fo:font-weight="bold" style:font-name-asian="Verdana" style:font-size-asian="12pt" style:font-weight-asian="bold" style:font-name-complex="Verdana" style:font-size-complex="12pt"/>
    </style:style>
    <style:style style:name="T2" style:family="text">
      <style:text-properties style:font-name="Times New Roman" fo:font-size="12pt" fo:font-weight="bold" style:font-name-asian="Century Gothic1" style:font-size-asian="12pt" style:font-weight-asian="bold" style:font-name-complex="Century Gothic1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style:font-name-asian="Century Gothic1" style:font-size-asian="12pt" style:font-name-complex="Century Gothic1" style:font-size-complex="12pt"/>
    </style:style>
    <style:style style:name="T5" style:family="text">
      <style:text-properties fo:color="#aeaaaa" loext:opacity="100%" style:font-name="Times New Roman" fo:font-size="12pt" style:font-name-asian="Century Gothic1" style:font-size-asian="12pt" style:font-name-complex="Century Gothic1" style:font-size-complex="12pt"/>
    </style:style>
    <style:style style:name="T6" style:family="text">
      <style:text-properties fo:color="#aeaaaa" loext:opacity="100%" style:font-name="Century Gothic" fo:font-size="9pt" style:font-name-asian="Century Gothic1" style:font-size-asian="9pt" style:font-name-complex="Century Gothic1"/>
    </style:style>
    <style:style style:name="T7" style:family="text">
      <style:text-properties style:font-name="Century Gothic" fo:font-size="9pt" style:font-name-asian="Century Gothic1" style:font-size-asian="9pt" style:font-name-complex="Century Gothic1"/>
    </style:style>
    <style:style style:name="T8" style:family="text">
      <style:text-properties style:font-name="Century Gothic" fo:font-size="9pt" fo:font-weight="bold" style:font-name-asian="Century Gothic1" style:font-size-asian="9pt" style:font-weight-asian="bold" style:font-name-complex="Century Gothic1"/>
    </style:style>
    <style:style style:name="T9" style:family="text">
      <style:text-properties style:font-name="Century Gothic" fo:font-size="9pt" fo:language="es" fo:country="MX" style:font-name-asian="Century Gothic1" style:font-size-asian="9pt" style:font-name-complex="Century Gothic1"/>
    </style:style>
    <style:style style:name="T10" style:family="text">
      <style:text-properties fo:color="#bfbfbf" loext:opacity="100%" style:font-name="Century Gothic" fo:font-size="9pt" style:font-name-asian="Century Gothic1" style:font-size-asian="9pt" style:font-name-complex="Century Gothic1"/>
    </style:style>
    <style:style style:name="T11" style:family="text">
      <style:text-properties fo:language="es" fo:country="MX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round" draw:fill="none" loext:fill-use-slide-background="false" draw:textarea-vertical-align="middle" draw:auto-grow-height="false" fo:min-height="1.476cm" fo:min-width="16.73cm" fo:padding-top="0.127cm" fo:padding-bottom="0.127cm" fo:padding-left="0.254cm" fo:padding-right="0.254cm" fo:wrap-option="wrap" loext:decorative="false" fo:margin-left="0.302cm" fo:margin-right="0.303cm" fo:margin-top="0cm" fo:margin-bottom="0.002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round" draw:fill="none" loext:fill-use-slide-background="false" draw:textarea-vertical-align="middle" draw:auto-grow-height="false" fo:min-height="2.067cm" fo:min-width="7.878cm" fo:padding-top="0.127cm" fo:padding-bottom="0.127cm" fo:padding-left="0.254cm" fo:padding-right="0.254cm" fo:wrap-option="wrap" loext:decorative="false" fo:margin-left="0.302cm" fo:margin-right="0.303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6cm" svg:stroke-color="#000000" draw:stroke-linejoin="round" draw:fill="none" loext:fill-use-slide-background="false" draw:textarea-vertical-align="middle" draw:auto-grow-height="false" fo:min-height="2.05cm" fo:min-width="7.798cm" fo:padding-top="0.127cm" fo:padding-bottom="0.127cm" fo:padding-left="0.254cm" fo:padding-right="0.254cm" fo:wrap-option="wrap" loext:decorative="false" fo:margin-left="0.303cm" fo:margin-right="0.30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2f2f2" draw:textarea-vertical-align="middle" draw:auto-grow-height="false" fo:min-height="0.633cm" fo:min-width="8.3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" loext:marker-style-name="T3"><text:span text:style-name="T1">EXAMEN</text:span><text:span text:style-name="T1"/></text:p>
        <text:p text:style-name="P6" loext:marker-style-name="T3"><text:span text:style-name="T1"><text:s/></text:span><text:span text:style-name="T4">(</text:span><text:span text:style-name="T5">COMPETENCIAS DE INTELIGENCIA COMERCIAL</text:span><text:span text:style-name="T4">)</text:span></text:p>
        <text:p text:style-name="P8" loext:marker-style-name="T3"><draw:custom-shape text:anchor-type="char" draw:z-index="2" draw:name="Rectángulo 2" draw:style-name="gr3" draw:text-style-name="P14" svg:width="8.305cm" svg:height="2.303cm" svg:x="-0.247cm" svg:y="0.635cm"><text:p text:style-name="P1"><text:span text:style-name="T7">Universidad : </text:span><text:span text:style-name="T10">Escribir el nombre del docente</text:span></text:p><text:p text:style-name="P3"><text:span text:style-name="T7">Carrera : </text:span><text:span text:style-name="T10">01</text:span></text:p><text:p text:style-name="P3"><text:span text:style-name="T7">Nro. de Grupo </text:span><text:span text:style-name="T10">Semana 0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ángulo 5" draw:style-name="gr2" draw:text-style-name="P14" svg:width="8.385cm" svg:height="2.32cm" svg:x="8.537cm" svg:y="0.635cm"><text:p text:style-name="P1"><text:span text:style-name="T7">Apellidos : ………………………..……………….</text:span></text:p><text:p text:style-name="P1"><text:span text:style-name="T7">Nombres : ……………………………………….</text:span></text:p><text:p text:style-name="P1"><text:span text:style-name="T7">Fecha : .…../……/2023 Duración: </text:span><text:span text:style-name="T10">Indic. Tiem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ángulo 4" draw:style-name="gr1" draw:text-style-name="P14" svg:width="17.237cm" svg:height="1.729cm" svg:x="-0.318cm" svg:y="3.246cm"><text:p text:style-name="P2"><text:span text:style-name="T8">Instrucciones</text:span><text:span text:style-name="T7">: </text:span><text:span text:style-name="T6">Lea con detenimiento la descripción del caso compartido a continuación, e identifique la información que se solicita. Puede usar material didáctico, apuntes, computadora, etc. Recuerde que el examen es analítico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Propósito: </text:span><text:span text:style-name="T5">El estudiante será capaz de reconocer los conceptos aprendidos y proponer soluciones a cada uno de los casos planteados con la finalidad para el estudio de mercado de acuerdo al producto y mercado elegido.</text:span></text:p>
        <text:list text:style-name="WWNum1">
          <text:list-item>
            <text:p text:style-name="P9" loext:marker-style-name="T3"><text:span text:style-name="T2">CASO 1: Descripción o presentación del caso (10 puntos)</text:span><text:span text:style-name="T2"/></text:p>
          </text:list-item>
        </text:list>
        <text:p text:style-name="P11" loext:marker-style-name="T3"><text:span text:style-name="T4">La empresa “Elisur” está ubicada en la región Junín, dedicada netamente a la venta de Jengibre, tiene una gran venta a nivel nacional abarcando más de 12 departamentos; sin embargo, la gerencia después de evaluar números, capacidad productiva, calidad de producto, cree que ya es momento que su producto llegue a otros mercados fuera del Perú, entre ellos el mercado norteamericano (EE.UU).</text:span><text:span text:style-name="T4"/></text:p>
        <text:p text:style-name="P11" loext:marker-style-name="T3"><text:span text:style-name="T4">Si bien la empresa empezó con la mira a desarrollar productos de calidad, ellos tenían presente que el producto que se vende en Perú no es el mismo que se ofrecería a mercados internacionales, lo cual piden otras especificaciones, certificados, proceso productivo y más</text:span><text:span text:style-name="T4"/></text:p>
        <text:list text:style-name="WWNum2">
          <text:list-item>
            <text:p text:style-name="P5" loext:marker-style-name="T3"><text:span text:style-name="T2">Desarrolle las siguientes preguntas:</text:span><text:span text:style-name="T2"/></text:p>
          </text:list-item>
        </text:list>
        <text:p text:style-name="P10" loext:marker-style-name="T3"><text:span text:style-name="T4">a) Identifica la partida arancelaria del producto en mención.</text:span><text:span text:style-name="T4"/></text:p>
        <text:p text:style-name="P10" loext:marker-style-name="T3"><text:span text:style-name="T4">b) Realiza un comparativo de la exportación en kg y $ de jengibre de los último 4 años en Excel para el mercado estadounidense y detalla las empresas exportadoras de jengibre en Perú, cada tabla con su interpretación.</text:span><text:span text:style-name="T4"/></text:p>
        <text:p text:style-name="P10" loext:marker-style-name="T3"><text:span text:style-name="T4">c) Desarrolla gráficos usando Power BI comparando la exportación del jengibre en los 3 primeros países a nivel mundial. Cada grafico con su propia interpretación.</text:span><text:span text:style-name="T4"/></text:p>
        <text:p text:style-name="P10" loext:marker-style-name="T3"><text:span text:style-name="T4">d) Calcular el VCR y CRC del producto o grupo de productos para determinar un mercado potencial.</text:span><text:span text:style-name="T4"/></text:p>
        <text:p text:style-name="P10" loext:marker-style-name="T3"><text:span text:style-name="T4">e) Mostrar en un gráfico de barras horizontales las exportaciones mundiales totales del jengibre.</text:span><text:span text:style-name="T4"/></text:p>
        <text:p text:style-name="P12" loext:marker-style-name="T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entury Gothic" svg:font-family="'Century Gothic'" style:font-family-generic="roman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" fo:font-size="11pt" fo:language="es" fo:country="ES" style:letter-kerning="false" style:font-name-asian="Calibri1" style:font-size-asian="11pt" style:language-asian="es" style:country-asian="PE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loext:opacity="100%" style:font-name="Calibri" fo:font-size="11pt" fo:language="es" fo:country="ES" style:letter-kerning="false" style:font-name-asian="Calibri1" style:font-size-asian="11pt" style:language-asian="es" style:country-asian="PE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PE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ne_20_Numbering" style:display-name="Line Numbering" style:family="text"/>
    <style:style style:name="ListLabel_20_1" style:display-name="ListLabel 1" style:family="text">
      <style:text-properties fo:color="#000000" loext:opacity="100%"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10.1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12.06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4.445cm" fo:margin-left="13.97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15.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>
      <loext:graphic-properties draw:fill="solid" draw:fill-color="#f2f2f2"/>
      <style:paragraph-properties fo:text-align="start"/>
      <style:text-properties fo:color="#000000" loext:opacity="100%" fo:font-size="18pt"/>
    </style:style>
    <style:style style:name="MT1" style:family="text">
      <style:text-properties fo:language="es" fo:country="MX"/>
    </style:style>
    <style:style style:name="MT2" style:family="text">
      <style:text-properties style:font-name="Century Gothic" fo:font-size="9pt" fo:language="es" fo:country="MX" style:font-name-asian="Century Gothic1" style:font-size-asian="9pt" style:font-name-complex="Century Gothic1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solid" draw:fill-color="#f2f2f2" draw:textarea-vertical-align="middle" draw:auto-grow-height="false" fo:min-height="0.633cm" fo:min-width="8.3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501cm" fo:margin-left="2.501cm" fo:margin-right="2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53cm" svg:y="-0.88cm" svg:width="4.048cm" svg:height="1.743cm" draw:z-index="0"><draw:image xlink:href="Pictures/1000000000000654000002B9EE66738B.png" xlink:type="simple" xlink:show="embed" xlink:actuate="onLoad" draw:mime-type="image/png"/><svg:desc>Comisión de Promoción del Perú para la Exportación y el Turismo -  Wikipedia, la enciclopedia libre</svg:desc></draw:frame><draw:custom-shape text:anchor-type="char" draw:z-index="1" draw:name="Rectángulo 3" draw:style-name="Mgr1" draw:text-style-name="MP3" svg:width="8.811cm" svg:height="0.886cm" svg:x="8.537cm" svg:y="-0.247cm"><text:p text:style-name="MP2" loext:marker-style-name="MT1"><text:span text:style-name="MT2">HUÁNUCO - 2022</text:span><text:span text:style-name="MT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2:55:00</meta:creation-date>
    <meta:initial-creator>Geraldine</meta:initial-creator>
    <dc:language>es-PE</dc:language>
    <dc:creator>Elmer Edison Achalma Mendoza</dc:creator>
    <dc:date>2023-12-31T17:25:03</dc:date>
    <meta:editing-cycles>15</meta:editing-cycles>
    <meta:editing-duration>PT2H16M</meta:editing-duration>
    <meta:generator>LibreOffice/24.2.4.2$Linux_X86_64 LibreOffice_project/420$Build-2</meta:generator>
    <meta:document-statistic meta:table-count="0" meta:image-count="1" meta:object-count="0" meta:page-count="1" meta:paragraph-count="20" meta:word-count="325" meta:character-count="2069" meta:non-whitespace-character-count="1765"/>
    <meta:user-defined meta:name="AppVersion">15.0000</meta:user-defined>
    <meta:template xlink:type="simple" xlink:actuate="onRequest" xlink:title="Normal" xlink:href=""/>
  </office:meta>
</office:document-meta>
</file>