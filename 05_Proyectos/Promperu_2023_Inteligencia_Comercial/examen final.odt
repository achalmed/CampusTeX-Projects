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4000002B9EE667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line-height="113%"/>
    </style:style>
    <style:style style:name="P2" style:family="paragraph" style:parent-style-name="Frame_20_contents">
      <style:paragraph-properties fo:line-height="113%" fo:text-align="justify" style:justify-single-word="false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List_20_Paragraph" style:list-style-name="WWNum2">
      <style:paragraph-properties fo:margin-left="1cm" fo:margin-top="0cm" fo:margin-bottom="0.353cm" style:contextual-spacing="true" fo:line-height="200%" fo:text-indent="-0.499cm" style:auto-text-indent="false">
        <style:tab-stops>
          <style:tab-stop style:position="5.186cm"/>
        </style:tab-stops>
      </style:paragraph-properties>
    </style:style>
    <style:style style:name="P6" style:family="paragraph" style:parent-style-name="Standard">
      <style:paragraph-properties fo:margin-top="0.212cm" fo:margin-bottom="0cm" style:contextual-spacing="false" fo:line-height="200%" fo:text-align="center" style:justify-single-word="false"/>
    </style:style>
    <style:style style:name="P7" style:family="paragraph" style:parent-style-name="Standard" style:master-page-name="Standard">
      <style:paragraph-properties fo:margin-top="0.212cm" fo:margin-bottom="0cm" style:contextual-spacing="false" fo:line-height="200%" fo:text-align="center" style:justify-single-word="false" style:page-number="1"/>
    </style:style>
    <style:style style:name="P8" style:family="paragraph" style:parent-style-name="Standard">
      <style:paragraph-properties fo:line-height="200%" fo:text-align="justify" style:justify-single-word="false"/>
    </style:style>
    <style:style style:name="P9" style:family="paragraph" style:parent-style-name="Standard">
      <style:paragraph-properties fo:line-height="200%" fo:text-align="justify" style:justify-single-word="false">
        <style:tab-stops>
          <style:tab-stop style:position="5.186cm"/>
        </style:tab-stops>
      </style:paragraph-properties>
    </style:style>
    <style:style style:name="P10" style:family="paragraph" style:parent-style-name="Standard" style:list-style-name="WWNum1">
      <style:paragraph-properties fo:margin-left="0.751cm" fo:margin-top="0cm" fo:margin-bottom="0.353cm" style:contextual-spacing="true" fo:line-height="200%" fo:text-indent="-0.751cm" style:auto-text-indent="false">
        <style:tab-stops>
          <style:tab-stop style:position="5.186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line-height="200%">
        <style:tab-stops>
          <style:tab-stop style:position="5.186cm"/>
        </style:tab-stops>
      </style:paragraph-properties>
    </style:style>
    <style:style style:name="P12" style:family="paragraph" style:parent-style-name="Standard">
      <style:paragraph-properties fo:margin-top="0cm" fo:margin-bottom="0.353cm" style:contextual-spacing="true" fo:line-height="200%">
        <style:tab-stops>
          <style:tab-stop style:position="5.186cm"/>
        </style:tab-stops>
      </style:paragraph-properties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P13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P15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2pt" fo:font-weight="bold" style:font-name-asian="Verdana" style:font-size-asian="12pt" style:font-weight-asian="bold" style:font-name-complex="Verdana" style:font-size-complex="12pt"/>
    </style:style>
    <style:style style:name="T2" style:family="text"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name-asian="Century Gothic1" style:font-size-asian="12pt" style:font-name-complex="Century Gothic1" style:font-size-complex="12pt"/>
    </style:style>
    <style:style style:name="T5" style:family="text">
      <style:text-properties fo:color="#aeaaaa" loext:opacity="100%" style:font-name="Times New Roman" fo:font-size="12pt" style:font-name-asian="Century Gothic1" style:font-size-asian="12pt" style:font-name-complex="Century Gothic1" style:font-size-complex="12pt"/>
    </style:style>
    <style:style style:name="T6" style:family="text">
      <style:text-properties fo:color="#aeaaaa" loext:opacity="100%" style:font-name="Century Gothic" fo:font-size="9pt" style:font-name-asian="Century Gothic1" style:font-size-asian="9pt" style:font-name-complex="Century Gothic1"/>
    </style:style>
    <style:style style:name="T7" style:family="text">
      <style:text-properties style:font-name="Century Gothic" fo:font-size="9pt" style:font-name-asian="Century Gothic1" style:font-size-asian="9pt" style:font-name-complex="Century Gothic1"/>
    </style:style>
    <style:style style:name="T8" style:family="text">
      <style:text-properties style:font-name="Century Gothic" fo:font-size="9pt" fo:font-weight="bold" style:font-name-asian="Century Gothic1" style:font-size-asian="9pt" style:font-weight-asian="bold" style:font-name-complex="Century Gothic1"/>
    </style:style>
    <style:style style:name="T9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T10" style:family="text">
      <style:text-properties style:use-window-font-color="true" loext:opacity="0%" style:font-name="Century Gothic" fo:font-size="9pt" style:font-name-asian="Century Gothic1" style:font-size-asian="9pt" style:font-name-complex="Century Gothic1"/>
    </style:style>
    <style:style style:name="T11" style:family="text">
      <style:text-properties fo:language="es" fo:country="MX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0.972cm" fo:min-width="16.704cm" fo:padding-top="0.127cm" fo:padding-bottom="0.127cm" fo:padding-left="0.254cm" fo:padding-right="0.254cm" fo:wrap-option="wrap" loext:decorative="false" fo:margin-left="0.302cm" fo:margin-right="0.346cm" fo:margin-top="0cm" fo:margin-bottom="0.032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67cm" fo:min-width="7.878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5cm" fo:min-width="7.798cm" fo:padding-top="0.127cm" fo:padding-bottom="0.127cm" fo:padding-left="0.254cm" fo:padding-right="0.254cm" fo:wrap-option="wrap" loext:decorative="false" fo:margin-left="0.303cm" fo:margin-right="0.30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 loext:marker-style-name="T3"><text:span text:style-name="T1">EXAMEN</text:span><text:span text:style-name="T1"/></text:p>
        <text:p text:style-name="P6" loext:marker-style-name="T3"><text:span text:style-name="T1"><text:s/></text:span><text:span text:style-name="T4">(</text:span><text:span text:style-name="T5">RED DE INTELIGENCIA COMERCIAL AYACUCHO</text:span><text:span text:style-name="T4">)</text:span></text:p>
        <text:p text:style-name="P8" loext:marker-style-name="T3"><draw:custom-shape text:anchor-type="char" draw:z-index="2" draw:name="Rectángulo 2" draw:style-name="gr3" draw:text-style-name="P14" svg:width="8.305cm" svg:height="2.303cm" svg:x="-0.247cm" svg:y="0.635cm"><text:p text:style-name="P1"><text:span text:style-name="T7">Inst. Educativa: </text:span></text:p><text:p text:style-name="P3"><text:span text:style-name="T7">Carrera : </text:span></text:p><text:p text:style-name="P3"><text:span text:style-name="T7">Nro. de Grupo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ángulo 5" draw:style-name="gr2" draw:text-style-name="P14" svg:width="8.385cm" svg:height="2.32cm" svg:x="8.537cm" svg:y="0.635cm"><text:p text:style-name="P1"><text:span text:style-name="T7">Apellidos : ………………………..……………….</text:span></text:p><text:p text:style-name="P1"><text:span text:style-name="T7">Nombres : ……………………………………….</text:span></text:p><text:p text:style-name="P1"><text:span text:style-name="T7">Fecha : .…../……/2023 Duración: </text:span><text:span text:style-name="T10">2 hor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ángulo 4" draw:style-name="gr1" draw:text-style-name="P14" svg:width="17.211cm" svg:height="1.225cm" svg:x="-0.31cm" svg:y="3.253cm"><text:p text:style-name="P2"><text:span text:style-name="T8">Instrucciones</text:span><text:span text:style-name="T7">: </text:span><text:span text:style-name="T6">Lea con detenimiento la descripción del caso compartido a continuación, e identifique la información que se solicita. Puede usar material didáctico, apuntes, computadora, etc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Propósito: </text:span><text:span text:style-name="T5">El estudiante será capaz de aplicar los conceptos aprendidos y proponer soluciones a cada uno de los casos planteados con la finalidad para el estudio de mercado de acuerdo al producto y mercado elegido.</text:span></text:p>
        <text:list text:style-name="WWNum1">
          <text:list-item>
            <text:p text:style-name="P10" loext:marker-style-name="T3"><text:span text:style-name="T2">CASO 1: Descripción o presentación del caso (20 puntos)</text:span><text:span text:style-name="T2"/></text:p>
          </text:list-item>
        </text:list>
        <text:p text:style-name="P9" loext:marker-style-name="T3"><text:span text:style-name="T4">La empresa “Granos del sol” ubicada en la región Ayacucho, se dedica netamente a la producción de quinua orgánica, actualmente distribuye su producto (Quinua orgánica en grano) a diversas empresas a nivel nacional, muchas de ellas exportadoras. La empresa, al ver que cuenta con la calidad de producto y capacidad productiva necesaria para un mercado internacional, desea comenzar a realizar exportaciones directas. Sin embargo, no cuentan con información internacional ni conocimientos sobre cuál sería un mercado potencial para su producto.</text:span><text:span text:style-name="T4"/></text:p>
        <text:p text:style-name="P9" loext:marker-style-name="T3"><text:span text:style-name="T4">Para ello, la empresa contrata a un especialista en inteligencia comercial, para que oriente y brinde información valiosa que les ayudará a la toma de decisiones, elección del mercado de destino y disminuirá los mayores riesgos posibles en su proceso de exportación.</text:span><text:span text:style-name="T4"/></text:p>
        <text:list text:style-name="WWNum2">
          <text:list-item>
            <text:p text:style-name="P5" loext:marker-style-name="T3"><text:span text:style-name="T2">Desarrolle las siguientes preguntas:</text:span><text:span text:style-name="T2"/></text:p>
          </text:list-item>
        </text:list>
        <text:p text:style-name="P11" loext:marker-style-name="T3"><text:span text:style-name="T4">a) Identifica la partida arancelaria del producto en mención.</text:span><text:span text:style-name="T4"/></text:p>
        <text:p text:style-name="P11" loext:marker-style-name="T3"><text:span text:style-name="T4">b) Identifica los principales países importadores del producto en mención.</text:span><text:span text:style-name="T4"/></text:p>
        <text:p text:style-name="P11" loext:marker-style-name="T3"><text:span text:style-name="T4">c) Calcular el VCR y CRC del producto o grupo de productos para determinar un mercado potencial. (sustentar el mercado elegido)</text:span><text:span text:style-name="T4"/></text:p>
        <text:p text:style-name="P11" loext:marker-style-name="T3"><text:span text:style-name="T4">d) Usando el Power BI, identifica los principales países de destino de las exportaciones peruanas de quinua. A la vez identifica las principales regiones del Perú con mayores niveles de exportación.</text:span><text:span text:style-name="T4"/></text:p>
        <text:p text:style-name="P11" loext:marker-style-name="T3"><text:span text:style-name="T4">e) Identificar que tratado de libre comercio o acuerdo comercial existe entre el Perú y el país elegido en el punto C. Además, identifica si existe o no arancel preferencial.</text:span><text:span text:style-name="T4"/></text:p>
        <text:p text:style-name="P11" loext:marker-style-name="T3"><text:span text:style-name="T4">f) Identifica las principales actividades de promoción comercial para el producto en mención en el país de destino.</text:span><text:span text:style-name="T4"/></text:p>
        <text:p text:style-name="P12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P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fo:color="#00000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10.1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12.06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4.445cm" fo:margin-left="13.97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MT1" style:family="text">
      <style:text-properties fo:language="es" fo:country="MX"/>
    </style:style>
    <style:style style:name="MT2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501cm" fo:margin-left="2.501cm" fo:margin-right="2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53cm" svg:y="-0.88cm" svg:width="4.048cm" svg:height="1.743cm" draw:z-index="0"><draw:image xlink:href="Pictures/1000000000000654000002B9EE66738B.png" xlink:type="simple" xlink:show="embed" xlink:actuate="onLoad" draw:mime-type="image/png"/><svg:desc>Comisión de Promoción del Perú para la Exportación y el Turismo -  Wikipedia, la enciclopedia libre</svg:desc></draw:frame><draw:custom-shape text:anchor-type="char" draw:z-index="1" draw:name="Rectángulo 3" draw:style-name="Mgr1" draw:text-style-name="MP3" svg:width="8.811cm" svg:height="0.886cm" svg:x="8.537cm" svg:y="-0.247cm"><text:p text:style-name="MP2" loext:marker-style-name="MT1"><text:span text:style-name="MT2">AYACUCHO - 2022</text:span><text:span text:style-name="M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5:44:00</meta:creation-date>
    <meta:initial-creator>Geraldine</meta:initial-creator>
    <dc:language>es-PE</dc:language>
    <dc:creator>Elmer Edison Achalma Mendoza</dc:creator>
    <dc:date>2023-12-31T17:25:00</dc:date>
    <meta:editing-cycles>3</meta:editing-cycles>
    <meta:editing-duration>PT6M</meta:editing-duration>
    <meta:generator>LibreOffice/24.2.4.2$Linux_X86_64 LibreOffice_project/420$Build-2</meta:generator>
    <meta:document-statistic meta:table-count="0" meta:image-count="1" meta:object-count="0" meta:page-count="1" meta:paragraph-count="21" meta:word-count="344" meta:character-count="2254" meta:non-whitespace-character-count="1928"/>
    <meta:user-defined meta:name="AppVersion">15.0000</meta:user-defined>
    <meta:template xlink:type="simple" xlink:actuate="onRequest" xlink:title="Normal" xlink:href=""/>
  </office:meta>
</office:document-meta>
</file>