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4000001727E54F98E.jpg" manifest:media-type="image/jpeg"/>
  <manifest:file-entry manifest:full-path="Pictures/100000010000020000000200D8E76D9D.png" manifest:media-type="image/png"/>
  <manifest:file-entry manifest:full-path="Pictures/1000000100000384000002D02055DACD.png" manifest:media-type="image/png"/>
  <manifest:file-entry manifest:full-path="Pictures/100000010000020000000200838A945D.png" manifest:media-type="image/png"/>
  <manifest:file-entry manifest:full-path="Pictures/10000000000003840000026C4A856417.jpg" manifest:media-type="image/jpeg"/>
  <manifest:file-entry manifest:full-path="Pictures/10000001000004B0000002A36F93362F.gif" manifest:media-type="image/gif"/>
  <manifest:file-entry manifest:full-path="Pictures/100000010000020000000200CDE06534.png" manifest:media-type="image/png"/>
  <manifest:file-entry manifest:full-path="Pictures/10000001000003480000031B0CD7115E.png" manifest:media-type="image/png"/>
  <manifest:file-entry manifest:full-path="Pictures/10000000000002850000016B4FCAF68C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872cm, 0cm, 1.634cm)" draw:image-opacity="100%" style:mirror="none" loext:decorative="false"/>
    </style:style>
    <style:style style:name="gr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>
      <style:graphic-properties draw:stroke="solid" svg:stroke-width="0.044cm" svg:stroke-color="#ffffff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light1" loext:color-type="theme"/>
        <loext:fill-complex-color loext:theme-type="light1" loext:color-type="theme"/>
      </style:graphic-properties>
    </style:style>
    <style:style style:name="gr9" style:family="graphic" style:parent-style-name="standard">
      <style:graphic-properties draw:stroke="solid" svg:stroke-width="0.035cm" svg:stroke-color="#d34817" draw:marker-end="msArrowEnd_20_5" draw:marker-end-width="0.21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gr1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5" style:family="graphic" style:parent-style-name="standard">
      <style:graphic-properties draw:stroke="solid" svg:stroke-width="0.044cm" svg:stroke-color="#9c3510" svg:stroke-linecap="butt" draw:fill="solid" draw:fill-color="#d3481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</style:style>
    <style:style style:name="gr16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solid" svg:stroke-width="0.044cm" svg:stroke-color="#f4b39b" svg:stroke-linecap="butt" draw:fill="solid" draw:fill-color="#ef8c6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>
          <loext:transformation loext:type="lummod" loext:value="4000"/>
          <loext:transformation loext:type="lumoff" loext:value="6000"/>
        </loext:stroke-complex-color>
        <loext:fill-complex-color loext:theme-type="accent1" loext:color-type="theme">
          <loext:transformation loext:type="lummod" loext:value="6000"/>
          <loext:transformation loext:type="lumoff" loext:value="4000"/>
        </loext:fill-complex-color>
      </style:graphic-properties>
    </style:style>
    <style:style style:name="gr2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5" style:family="graphic" style:parent-style-name="standard">
      <style:graphic-properties draw:stroke="solid" svg:stroke-width="0.044cm" svg:stroke-color="#d8bfb6" svg:stroke-linecap="butt" draw:fill="solid" draw:fill-color="#c49f9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4" loext:color-type="theme">
          <loext:transformation loext:type="lummod" loext:value="4000"/>
          <loext:transformation loext:type="lumoff" loext:value="6000"/>
        </loext:stroke-complex-color>
        <loext:fill-complex-color loext:theme-type="accent4" loext:color-type="theme">
          <loext:transformation loext:type="lummod" loext:value="6000"/>
          <loext:transformation loext:type="lumoff" loext:value="4000"/>
        </loext:fill-complex-color>
      </style:graphic-properties>
    </style:style>
    <style:style style:name="gr26" style:family="graphic" style:parent-style-name="standard">
      <style:graphic-properties draw:stroke="solid" svg:stroke-width="0.044cm" svg:stroke-color="#bdb196" svg:stroke-linecap="butt" draw:fill="solid" draw:fill-color="#8b7b5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light2" loext:color-type="theme">
          <loext:transformation loext:type="lummod" loext:value="7500"/>
        </loext:stroke-complex-color>
        <loext:fill-complex-color loext:theme-type="light2" loext:color-type="theme">
          <loext:transformation loext:type="lummod" loext:value="5000"/>
        </loext:fill-complex-color>
      </style:graphic-properties>
    </style:style>
    <style:style style:name="gr27" style:family="graphic" style:parent-style-name="standard">
      <style:graphic-properties draw:stroke="solid" svg:stroke-width="0.044cm" svg:stroke-color="#c3c1c1" svg:stroke-linecap="butt" draw:fill="solid" draw:fill-color="#a6a1a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dark2" loext:color-type="theme">
          <loext:transformation loext:type="lummod" loext:value="4000"/>
          <loext:transformation loext:type="lumoff" loext:value="6000"/>
        </loext:stroke-complex-color>
        <loext:fill-complex-color loext:theme-type="dark2" loext:color-type="theme">
          <loext:transformation loext:type="lummod" loext:value="6000"/>
          <loext:transformation loext:type="lumoff" loext:value="4000"/>
        </loext:fill-complex-color>
      </style:graphic-properties>
    </style:style>
    <style:style style:name="gr28" style:family="graphic" style:parent-style-name="standard">
      <style:graphic-properties draw:stroke="solid" svg:stroke-width="0.044cm" svg:stroke-color="#d8d0c0" svg:stroke-linecap="butt" draw:fill="solid" draw:fill-color="#c7bba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light2" loext:color-type="theme">
          <loext:transformation loext:type="lummod" loext:value="9000"/>
        </loext:stroke-complex-color>
        <loext:fill-complex-color loext:theme-type="accent3" loext:color-type="theme">
          <loext:transformation loext:type="lummod" loext:value="6000"/>
          <loext:transformation loext:type="lumoff" loext:value="4000"/>
        </loext:fill-complex-color>
      </style:graphic-properties>
    </style:style>
    <style:style style:name="gr2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dash" draw:stroke-dash="Long_20_Dash_20_Dot" svg:stroke-width="0.035cm" svg:stroke-color="#d34817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gr3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104cm, 0cm, 0cm, 0cm)" draw:image-opacity="100%" style:mirror="none" loext:decorative="false"/>
    </style:style>
    <style:style style:name="gr34" style:family="graphic" style:parent-style-name="standard" style:list-style-name="L9">
      <style:graphic-properties draw:stroke="solid" svg:stroke-width="0.044cm" svg:stroke-color="#9c3510" svg:stroke-linecap="butt" draw:fill="solid" draw:fill-color="#d3481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35" style:family="graphic" style:parent-style-name="standard" style:list-style-name="L9">
      <style:graphic-properties draw:stroke="solid" svg:stroke-width="0.044cm" svg:stroke-color="#9c3510" svg:stroke-linecap="butt" draw:fill="solid" draw:fill-color="#d3481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36" style:family="graphic" style:parent-style-name="standard" style:list-style-name="L9">
      <style:graphic-properties draw:stroke="solid" svg:stroke-width="0.044cm" svg:stroke-color="#9c3510" svg:stroke-linecap="butt" draw:fill="solid" draw:fill-color="#d3481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37" style:family="graphic" style:parent-style-name="standard" style:list-style-name="L9">
      <style:graphic-properties draw:stroke="solid" svg:stroke-width="0.044cm" svg:stroke-color="#9c3510" svg:stroke-linecap="butt" draw:fill="solid" draw:fill-color="#d3481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38" style:family="graphic" style:parent-style-name="standard" style:list-style-name="L9">
      <style:graphic-properties draw:stroke="solid" svg:stroke-width="0.044cm" svg:stroke-color="#9c3510" svg:stroke-linecap="butt" draw:fill="solid" draw:fill-color="#d3481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39" style:family="graphic" style:parent-style-name="standard" style:list-style-name="L9">
      <style:graphic-properties draw:stroke="solid" svg:stroke-width="0.044cm" svg:stroke-color="#9c3510" svg:stroke-linecap="butt" draw:fill="solid" draw:fill-color="#d3481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40" style:family="graphic" style:parent-style-name="standard" style:list-style-name="L9">
      <style:graphic-properties draw:stroke="solid" svg:stroke-width="0.044cm" svg:stroke-color="#9c3510" svg:stroke-linecap="butt" draw:fill="solid" draw:fill-color="#d3481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41" style:family="graphic" style:parent-style-name="standard" style:list-style-name="L9">
      <style:graphic-properties draw:stroke="solid" svg:stroke-width="0.044cm" svg:stroke-color="#9c3510" svg:stroke-linecap="butt" draw:fill="solid" draw:fill-color="#d3481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42" style:family="graphic" style:parent-style-name="standard" style:list-style-name="L9">
      <style:graphic-properties draw:stroke="solid" svg:stroke-width="0.044cm" svg:stroke-color="#9c3510" svg:stroke-linecap="butt" draw:fill="solid" draw:fill-color="#d3481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43" style:family="graphic" style:parent-style-name="standard" style:list-style-name="L9">
      <style:graphic-properties draw:stroke="solid" svg:stroke-width="0.044cm" svg:stroke-color="#9c3510" svg:stroke-linecap="butt" draw:fill="solid" draw:fill-color="#d3481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44" style:family="graphic">
      <style:graphic-properties style:writing-mode="lr-tb" loext:decorative="false"/>
    </style:style>
    <style:style style:name="gr45" style:family="graphic" style:parent-style-name="standard">
      <style:graphic-properties draw:stroke="none" svg:stroke-width="0cm" draw:fill="none" loext:fill-use-slide-background="false" draw:textarea-vertical-align="top" draw:auto-grow-height="false" fo:min-height="19.675cm" fo:min-width="21.804cm" fo:padding-top="0.125cm" fo:padding-bottom="0.125cm" fo:padding-left="0.25cm" fo:padding-right="0.25cm" fo:wrap-option="wrap" style:protect="position size" loext:decorative="false"/>
    </style:style>
    <style:style style:name="gr46" style:family="graphic" style:parent-style-name="standard">
      <style:graphic-properties draw:stroke="solid" svg:stroke-width="0.044cm" svg:stroke-color="#956251" svg:stroke-linecap="butt" draw:fill="none" loext:fill-use-slide-background="false" draw:textarea-vertical-align="top" draw:auto-grow-height="false" fo:min-height="7.193cm" fo:min-width="3.758cm" fo:padding-top="0.125cm" fo:padding-bottom="0.125cm" fo:padding-left="0.25cm" fo:padding-right="0.25cm" fo:wrap-option="wrap" loext:decorative="false">
        <loext:stroke-complex-color loext:theme-type="accent4" loext:color-type="theme"/>
      </style:graphic-properties>
    </style:style>
    <style:style style:name="gr47" style:family="graphic" style:parent-style-name="standard">
      <style:graphic-properties draw:stroke="solid" svg:stroke-width="0.044cm" svg:stroke-color="#956251" svg:stroke-linecap="butt" draw:fill="none" loext:fill-use-slide-background="false" draw:textarea-vertical-align="top" draw:auto-grow-height="false" fo:min-height="5.09cm" fo:min-width="3.727cm" fo:padding-top="0.125cm" fo:padding-bottom="0.125cm" fo:padding-left="0.25cm" fo:padding-right="0.25cm" fo:wrap-option="wrap" loext:decorative="false">
        <loext:stroke-complex-color loext:theme-type="accent4" loext:color-type="theme"/>
      </style:graphic-properties>
    </style:style>
    <style:style style:name="gr48" style:family="graphic" style:parent-style-name="standard">
      <style:graphic-properties draw:stroke="solid" svg:stroke-width="0.044cm" svg:stroke-color="#956251" svg:stroke-linecap="butt" draw:fill="none" loext:fill-use-slide-background="false" draw:textarea-vertical-align="top" draw:auto-grow-height="false" fo:min-height="5.071cm" fo:min-width="0.408cm" fo:padding-top="0.125cm" fo:padding-bottom="0.125cm" fo:padding-left="0.25cm" fo:padding-right="0.25cm" fo:wrap-option="wrap" loext:decorative="false">
        <loext:stroke-complex-color loext:theme-type="accent4" loext:color-type="theme"/>
      </style:graphic-properties>
    </style:style>
    <style:style style:name="gr49" style:family="graphic" style:parent-style-name="standard">
      <style:graphic-properties draw:stroke="solid" svg:stroke-width="0.044cm" svg:stroke-color="#956251" svg:stroke-linecap="butt" draw:fill="none" loext:fill-use-slide-background="false" draw:textarea-vertical-align="top" draw:auto-grow-height="false" fo:min-height="2.941cm" fo:min-width="3.685cm" fo:padding-top="0.125cm" fo:padding-bottom="0.125cm" fo:padding-left="0.25cm" fo:padding-right="0.25cm" fo:wrap-option="wrap" loext:decorative="false">
        <loext:stroke-complex-color loext:theme-type="accent4" loext:color-type="theme"/>
      </style:graphic-properties>
    </style:style>
    <style:style style:name="gr50" style:family="graphic" style:parent-style-name="standard">
      <style:graphic-properties draw:stroke="solid" svg:stroke-width="0.044cm" svg:stroke-color="#956251" svg:stroke-linecap="butt" draw:fill="none" loext:fill-use-slide-background="false" draw:textarea-vertical-align="top" draw:auto-grow-height="false" fo:min-height="7.202cm" fo:min-width="0.405cm" fo:padding-top="0.125cm" fo:padding-bottom="0.125cm" fo:padding-left="0.25cm" fo:padding-right="0.25cm" fo:wrap-option="wrap" loext:decorative="false">
        <loext:stroke-complex-color loext:theme-type="accent4" loext:color-type="theme"/>
      </style:graphic-properties>
    </style:style>
    <style:style style:name="gr51" style:family="graphic" style:parent-style-name="standard">
      <style:graphic-properties draw:stroke="solid" svg:stroke-width="0.044cm" svg:stroke-color="#956251" svg:stroke-linecap="butt" draw:fill="none" loext:fill-use-slide-background="false" draw:textarea-vertical-align="top" draw:auto-grow-height="false" fo:min-height="2.918cm" fo:min-width="0.331cm" fo:padding-top="0.125cm" fo:padding-bottom="0.125cm" fo:padding-left="0.25cm" fo:padding-right="0.25cm" fo:wrap-option="wrap" loext:decorative="false">
        <loext:stroke-complex-color loext:theme-type="accent4" loext:color-type="theme"/>
      </style:graphic-properties>
    </style:style>
    <style:style style:name="gr52" style:family="graphic" style:parent-style-name="standard">
      <style:graphic-properties draw:stroke="solid" svg:stroke-width="0.044cm" svg:stroke-color="#956251" svg:stroke-linecap="butt" draw:fill="none" loext:fill-use-slide-background="false" draw:textarea-vertical-align="top" draw:auto-grow-height="false" fo:min-height="0.792cm" fo:min-width="0.292cm" fo:padding-top="0.125cm" fo:padding-bottom="0.125cm" fo:padding-left="0.25cm" fo:padding-right="0.25cm" fo:wrap-option="wrap" loext:decorative="false">
        <loext:stroke-complex-color loext:theme-type="accent4" loext:color-type="theme"/>
      </style:graphic-properties>
    </style:style>
    <style:style style:name="gr53" style:family="graphic" style:parent-style-name="standard">
      <style:graphic-properties draw:stroke="solid" svg:stroke-width="0.044cm" svg:stroke-color="#956251" svg:stroke-linecap="butt" draw:fill="none" loext:fill-use-slide-background="false" draw:textarea-vertical-align="top" draw:auto-grow-height="false" fo:min-height="0.764cm" fo:min-width="3.572cm" fo:padding-top="0.125cm" fo:padding-bottom="0.125cm" fo:padding-left="0.25cm" fo:padding-right="0.25cm" fo:wrap-option="wrap" loext:decorative="false">
        <loext:stroke-complex-color loext:theme-type="accent4" loext:color-type="theme"/>
      </style:graphic-properties>
    </style:style>
    <style:style style:name="gr54" style:family="graphic" style:parent-style-name="standard">
      <style:graphic-properties draw:stroke="solid" svg:stroke-width="0.044cm" svg:stroke-color="#a28e6a" svg:stroke-linecap="butt" draw:fill="none" loext:fill-use-slide-background="false" draw:textarea-vertical-align="top" draw:auto-grow-height="false" fo:min-height="0.356cm" fo:min-width="1.247cm" fo:padding-top="0.125cm" fo:padding-bottom="0.125cm" fo:padding-left="0.25cm" fo:padding-right="0.25cm" fo:wrap-option="wrap" loext:decorative="false">
        <loext:stroke-complex-color loext:theme-type="accent3" loext:color-type="theme"/>
      </style:graphic-properties>
    </style:style>
    <style:style style:name="gr55" style:family="graphic" style:parent-style-name="standard">
      <style:graphic-properties draw:stroke="solid" svg:stroke-width="0.044cm" svg:stroke-color="#956251" svg:stroke-linecap="butt" draw:fill="none" loext:fill-use-slide-background="false" draw:textarea-vertical-align="top" draw:auto-grow-height="false" fo:min-height="3.193cm" fo:min-width="0cm" fo:padding-top="0.125cm" fo:padding-bottom="0.125cm" fo:padding-left="0.25cm" fo:padding-right="0.25cm" fo:wrap-option="wrap" loext:decorative="false">
        <loext:stroke-complex-color loext:theme-type="accent4" loext:color-type="theme"/>
      </style:graphic-properties>
    </style:style>
    <style:style style:name="gr56" style:family="graphic" style:parent-style-name="standard">
      <style:graphic-properties draw:stroke="solid" svg:stroke-width="0.044cm" svg:stroke-color="#956251" svg:stroke-linecap="butt" draw:fill="none" loext:fill-use-slide-background="false" draw:textarea-vertical-align="top" draw:auto-grow-height="false" fo:min-height="1.071cm" fo:min-width="0cm" fo:padding-top="0.125cm" fo:padding-bottom="0.125cm" fo:padding-left="0.25cm" fo:padding-right="0.25cm" fo:wrap-option="wrap" loext:decorative="false">
        <loext:stroke-complex-color loext:theme-type="accent4" loext:color-type="theme"/>
      </style:graphic-properties>
    </style:style>
    <style:style style:name="gr57" style:family="graphic" style:parent-style-name="standard">
      <style:graphic-properties draw:stroke="solid" svg:stroke-width="0.044cm" svg:stroke-color="#956251" svg:stroke-linecap="butt" draw:fill="none" loext:fill-use-slide-background="false" draw:textarea-vertical-align="top" draw:auto-grow-height="false" fo:min-height="1.078cm" fo:min-width="0cm" fo:padding-top="0.125cm" fo:padding-bottom="0.125cm" fo:padding-left="0.25cm" fo:padding-right="0.25cm" fo:wrap-option="wrap" loext:decorative="false">
        <loext:stroke-complex-color loext:theme-type="accent4" loext:color-type="theme"/>
      </style:graphic-properties>
    </style:style>
    <style:style style:name="gr58" style:family="graphic" style:parent-style-name="standard">
      <style:graphic-properties draw:stroke="solid" svg:stroke-width="0.044cm" svg:stroke-color="#a28e6a" svg:stroke-linecap="butt" draw:fill="none" loext:fill-use-slide-background="false" draw:textarea-vertical-align="top" draw:auto-grow-height="false" fo:min-height="0.356cm" fo:min-width="1.515cm" fo:padding-top="0.125cm" fo:padding-bottom="0.125cm" fo:padding-left="0.25cm" fo:padding-right="0.25cm" fo:wrap-option="wrap" loext:decorative="false">
        <loext:stroke-complex-color loext:theme-type="accent3" loext:color-type="theme"/>
      </style:graphic-properties>
    </style:style>
    <style:style style:name="gr59" style:family="graphic" style:parent-style-name="standard" style:list-style-name="L14">
      <style:graphic-properties draw:stroke="solid" svg:stroke-width="0.044cm" svg:stroke-color="#ffffff" svg:stroke-linecap="butt" draw:fill="solid" draw:fill-color="#d34817" draw:textarea-horizontal-align="justify" draw:textarea-vertical-align="middle" draw:auto-grow-height="false" draw:fit-to-size="false" style:shrink-to-fit="false" fo:min-height="1.393cm" fo:min-width="2.837cm" fo:padding-top="0.026cm" fo:padding-bottom="0.026cm" fo:padding-left="0.026cm" fo:padding-right="0.026cm" fo:wrap-option="wrap" style:writing-mode="lr-tb" loext:decorative="false">
        <loext:stroke-complex-color loext:theme-type="light1" loext:color-type="theme"/>
        <loext:fill-complex-color loext:theme-type="accent1" loext:color-type="theme"/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60" style:family="graphic" style:parent-style-name="standard" style:list-style-name="L14">
      <style:graphic-properties draw:stroke="solid" svg:stroke-width="0.044cm" svg:stroke-color="#ffffff" svg:stroke-linecap="butt" draw:fill="solid" draw:fill-color="#a28e6a" draw:textarea-horizontal-align="justify" draw:textarea-vertical-align="middle" draw:auto-grow-height="false" draw:fit-to-size="false" style:shrink-to-fit="false" fo:min-height="1.393cm" fo:min-width="2.837cm" fo:padding-top="0.026cm" fo:padding-bottom="0.026cm" fo:padding-left="0.026cm" fo:padding-right="0.026cm" fo:wrap-option="wrap" style:writing-mode="lr-tb" loext:decorative="false">
        <loext:stroke-complex-color loext:theme-type="light1" loext:color-type="theme"/>
        <loext:fill-complex-color loext:theme-type="accent3" loext:color-type="theme"/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61" style:family="graphic" style:parent-style-name="standard" style:list-style-name="L14">
      <style:graphic-properties draw:stroke="solid" svg:stroke-width="0.044cm" svg:stroke-color="#ffffff" svg:stroke-linecap="butt" draw:fill="solid" draw:fill-color="#956251" draw:textarea-horizontal-align="justify" draw:textarea-vertical-align="middle" draw:auto-grow-height="false" draw:fit-to-size="false" style:shrink-to-fit="false" fo:min-height="1.393cm" fo:min-width="2.837cm" fo:padding-top="0.026cm" fo:padding-bottom="0.026cm" fo:padding-left="0.026cm" fo:padding-right="0.026cm" fo:wrap-option="wrap" style:writing-mode="lr-tb" loext:decorative="false">
        <loext:stroke-complex-color loext:theme-type="light1" loext:color-type="theme"/>
        <loext:fill-complex-color loext:theme-type="accent4" loext:color-type="theme"/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62" style:family="graphic" style:parent-style-name="standard" style:list-style-name="L14">
      <style:graphic-properties draw:stroke="solid" svg:stroke-width="0.044cm" svg:stroke-color="#ffffff" svg:stroke-linecap="butt" draw:fill="solid" draw:fill-color="#956251" draw:textarea-horizontal-align="justify" draw:textarea-vertical-align="middle" draw:auto-grow-height="false" draw:fit-to-size="false" style:shrink-to-fit="false" fo:min-height="1.393cm" fo:min-width="2.837cm" fo:padding-top="0.026cm" fo:padding-bottom="0.026cm" fo:padding-left="0.026cm" fo:padding-right="0.026cm" fo:wrap-option="wrap" style:writing-mode="lr-tb" loext:decorative="false">
        <loext:stroke-complex-color loext:theme-type="light1" loext:color-type="theme"/>
        <loext:fill-complex-color loext:theme-type="accent4" loext:color-type="theme"/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63" style:family="graphic" style:parent-style-name="standard" style:list-style-name="L14">
      <style:graphic-properties draw:stroke="solid" svg:stroke-width="0.044cm" svg:stroke-color="#ffffff" svg:stroke-linecap="butt" draw:fill="solid" draw:fill-color="#956251" draw:textarea-horizontal-align="justify" draw:textarea-vertical-align="middle" draw:auto-grow-height="false" draw:fit-to-size="false" style:shrink-to-fit="false" fo:min-height="1.393cm" fo:min-width="2.837cm" fo:padding-top="0.026cm" fo:padding-bottom="0.026cm" fo:padding-left="0.026cm" fo:padding-right="0.026cm" fo:wrap-option="wrap" style:writing-mode="lr-tb" loext:decorative="false">
        <loext:stroke-complex-color loext:theme-type="light1" loext:color-type="theme"/>
        <loext:fill-complex-color loext:theme-type="accent4" loext:color-type="theme"/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64" style:family="graphic" style:parent-style-name="standard" style:list-style-name="L14">
      <style:graphic-properties draw:stroke="solid" svg:stroke-width="0.044cm" svg:stroke-color="#ffffff" svg:stroke-linecap="butt" draw:fill="solid" draw:fill-color="#956251" draw:textarea-horizontal-align="justify" draw:textarea-vertical-align="middle" draw:auto-grow-height="false" draw:fit-to-size="false" style:shrink-to-fit="false" fo:min-height="1.393cm" fo:min-width="2.837cm" fo:padding-top="0.026cm" fo:padding-bottom="0.026cm" fo:padding-left="0.026cm" fo:padding-right="0.026cm" fo:wrap-option="wrap" style:writing-mode="lr-tb" loext:decorative="false">
        <loext:stroke-complex-color loext:theme-type="light1" loext:color-type="theme"/>
        <loext:fill-complex-color loext:theme-type="accent4" loext:color-type="theme"/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65" style:family="graphic" style:parent-style-name="standard" style:list-style-name="L14">
      <style:graphic-properties draw:stroke="solid" svg:stroke-width="0.044cm" svg:stroke-color="#ffffff" svg:stroke-linecap="butt" draw:fill="solid" draw:fill-color="#a28e6a" draw:textarea-horizontal-align="justify" draw:textarea-vertical-align="middle" draw:auto-grow-height="false" draw:fit-to-size="false" style:shrink-to-fit="false" fo:min-height="1.393cm" fo:min-width="3.373cm" fo:padding-top="0.026cm" fo:padding-bottom="0.026cm" fo:padding-left="0.026cm" fo:padding-right="0.026cm" fo:wrap-option="wrap" style:writing-mode="lr-tb" loext:decorative="false">
        <loext:stroke-complex-color loext:theme-type="light1" loext:color-type="theme"/>
        <loext:fill-complex-color loext:theme-type="accent3" loext:color-type="theme"/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66" style:family="graphic" style:parent-style-name="standard" style:list-style-name="L14">
      <style:graphic-properties draw:stroke="solid" svg:stroke-width="0.044cm" svg:stroke-color="#ffffff" svg:stroke-linecap="butt" draw:fill="solid" draw:fill-color="#956251" draw:textarea-horizontal-align="justify" draw:textarea-vertical-align="middle" draw:auto-grow-height="false" draw:fit-to-size="false" style:shrink-to-fit="false" fo:min-height="1.393cm" fo:min-width="2.837cm" fo:padding-top="0.026cm" fo:padding-bottom="0.026cm" fo:padding-left="0.026cm" fo:padding-right="0.026cm" fo:wrap-option="wrap" style:writing-mode="lr-tb" loext:decorative="false">
        <loext:stroke-complex-color loext:theme-type="light1" loext:color-type="theme"/>
        <loext:fill-complex-color loext:theme-type="accent4" loext:color-type="theme"/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67" style:family="graphic" style:parent-style-name="standard" style:list-style-name="L14">
      <style:graphic-properties draw:stroke="solid" svg:stroke-width="0.044cm" svg:stroke-color="#ffffff" svg:stroke-linecap="butt" draw:fill="solid" draw:fill-color="#956251" draw:textarea-horizontal-align="justify" draw:textarea-vertical-align="middle" draw:auto-grow-height="false" draw:fit-to-size="false" style:shrink-to-fit="false" fo:min-height="1.393cm" fo:min-width="2.837cm" fo:padding-top="0.026cm" fo:padding-bottom="0.026cm" fo:padding-left="0.026cm" fo:padding-right="0.026cm" fo:wrap-option="wrap" style:writing-mode="lr-tb" loext:decorative="false">
        <loext:stroke-complex-color loext:theme-type="light1" loext:color-type="theme"/>
        <loext:fill-complex-color loext:theme-type="accent4" loext:color-type="theme"/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68" style:family="graphic" style:parent-style-name="standard" style:list-style-name="L14">
      <style:graphic-properties draw:stroke="solid" svg:stroke-width="0.044cm" svg:stroke-color="#ffffff" svg:stroke-linecap="butt" draw:fill="solid" draw:fill-color="#956251" draw:textarea-horizontal-align="justify" draw:textarea-vertical-align="middle" draw:auto-grow-height="false" draw:fit-to-size="false" style:shrink-to-fit="false" fo:min-height="1.393cm" fo:min-width="2.837cm" fo:padding-top="0.026cm" fo:padding-bottom="0.026cm" fo:padding-left="0.026cm" fo:padding-right="0.026cm" fo:wrap-option="wrap" style:writing-mode="lr-tb" loext:decorative="false">
        <loext:stroke-complex-color loext:theme-type="light1" loext:color-type="theme"/>
        <loext:fill-complex-color loext:theme-type="accent4" loext:color-type="theme"/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69" style:family="graphic" style:parent-style-name="standard" style:list-style-name="L14">
      <style:graphic-properties draw:stroke="solid" svg:stroke-width="0.044cm" svg:stroke-color="#ffffff" svg:stroke-linecap="butt" draw:fill="solid" draw:fill-color="#956251" draw:textarea-horizontal-align="justify" draw:textarea-vertical-align="middle" draw:auto-grow-height="false" draw:fit-to-size="false" style:shrink-to-fit="false" fo:min-height="1.393cm" fo:min-width="2.837cm" fo:padding-top="0.026cm" fo:padding-bottom="0.026cm" fo:padding-left="0.026cm" fo:padding-right="0.026cm" fo:wrap-option="wrap" style:writing-mode="lr-tb" loext:decorative="false">
        <loext:stroke-complex-color loext:theme-type="light1" loext:color-type="theme"/>
        <loext:fill-complex-color loext:theme-type="accent4" loext:color-type="theme"/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70" style:family="graphic" style:parent-style-name="standard" style:list-style-name="L14">
      <style:graphic-properties draw:stroke="solid" svg:stroke-width="0.044cm" svg:stroke-color="#ffffff" svg:stroke-linecap="butt" draw:fill="solid" draw:fill-color="#956251" draw:textarea-horizontal-align="justify" draw:textarea-vertical-align="middle" draw:auto-grow-height="false" draw:fit-to-size="false" style:shrink-to-fit="false" fo:min-height="1.393cm" fo:min-width="2.837cm" fo:padding-top="0.026cm" fo:padding-bottom="0.026cm" fo:padding-left="0.026cm" fo:padding-right="0.026cm" fo:wrap-option="wrap" style:writing-mode="lr-tb" loext:decorative="false">
        <loext:stroke-complex-color loext:theme-type="light1" loext:color-type="theme"/>
        <loext:fill-complex-color loext:theme-type="accent4" loext:color-type="theme"/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71" style:family="graphic" style:parent-style-name="standard" style:list-style-name="L14">
      <style:graphic-properties draw:stroke="solid" svg:stroke-width="0.044cm" svg:stroke-color="#ffffff" svg:stroke-linecap="butt" draw:fill="solid" draw:fill-color="#956251" draw:textarea-horizontal-align="justify" draw:textarea-vertical-align="middle" draw:auto-grow-height="false" draw:fit-to-size="false" style:shrink-to-fit="false" fo:min-height="1.393cm" fo:min-width="2.837cm" fo:padding-top="0.026cm" fo:padding-bottom="0.026cm" fo:padding-left="0.026cm" fo:padding-right="0.026cm" fo:wrap-option="wrap" style:writing-mode="lr-tb" loext:decorative="false">
        <loext:stroke-complex-color loext:theme-type="light1" loext:color-type="theme"/>
        <loext:fill-complex-color loext:theme-type="accent4" loext:color-type="theme"/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72" style:family="graphic" style:parent-style-name="standard" style:list-style-name="L14">
      <style:graphic-properties draw:stroke="solid" svg:stroke-width="0.044cm" svg:stroke-color="#ffffff" svg:stroke-linecap="butt" draw:fill="solid" draw:fill-color="#956251" draw:textarea-horizontal-align="justify" draw:textarea-vertical-align="middle" draw:auto-grow-height="false" draw:fit-to-size="false" style:shrink-to-fit="false" fo:min-height="1.393cm" fo:min-width="2.837cm" fo:padding-top="0.026cm" fo:padding-bottom="0.026cm" fo:padding-left="0.026cm" fo:padding-right="0.026cm" fo:wrap-option="wrap" style:writing-mode="lr-tb" loext:decorative="false">
        <loext:stroke-complex-color loext:theme-type="light1" loext:color-type="theme"/>
        <loext:fill-complex-color loext:theme-type="accent4" loext:color-type="theme"/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73" style:family="graphic" style:parent-style-name="standard" style:list-style-name="L14">
      <style:graphic-properties draw:stroke="solid" svg:stroke-width="0.044cm" svg:stroke-color="#ffffff" svg:stroke-linecap="butt" draw:fill="solid" draw:fill-color="#956251" draw:textarea-horizontal-align="justify" draw:textarea-vertical-align="middle" draw:auto-grow-height="false" draw:fit-to-size="false" style:shrink-to-fit="false" fo:min-height="1.393cm" fo:min-width="2.837cm" fo:padding-top="0.026cm" fo:padding-bottom="0.026cm" fo:padding-left="0.026cm" fo:padding-right="0.026cm" fo:wrap-option="wrap" style:writing-mode="lr-tb" loext:decorative="false">
        <loext:stroke-complex-color loext:theme-type="light1" loext:color-type="theme"/>
        <loext:fill-complex-color loext:theme-type="accent4" loext:color-type="theme"/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Diapositiva_20_d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iapositiva_20_de_20_título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iapositiva_20_de_20_títul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ítulo_20_y_20_objetos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ítulo_20_y_20_objetos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ítulo_20_y_20_objet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cm" fo:wrap-option="wrap" loext:decorative="false"/>
      <style:paragraph-properties style:writing-mode="lr-tb"/>
    </style:style>
    <style:style style:name="pr7" style:family="presentation" style:parent-style-name="Título_20_y_20_objetos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ítulo_20_y_20_objet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cm" fo:padding-right="0cm" fo:wrap-option="wrap" loext:decorative="false"/>
      <style:paragraph-properties style:writing-mode="lr-tb"/>
    </style:style>
    <style:style style:name="pr9" style:family="presentation" style:parent-style-name="Título_20_y_20_objetos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5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3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0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3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s" fo:country="P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4" style:family="paragraph">
      <loext:graphic-properties draw:fill="solid" draw:fill-color="#d34817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s" fo:country="P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5" style:family="paragraph">
      <style:paragraph-properties fo:margin-left="0cm" fo:margin-right="0cm" fo:margin-top="0cm" fo:margin-bottom="0.071cm" fo:line-height="90%" fo:text-align="start" fo:text-indent="0cm" style:punctuation-wrap="hanging" loext:tab-stop-distance="2.54cm" style:writing-mode="lr-tb">
        <style:tab-stops/>
      </style:paragraph-properties>
      <style:text-properties fo:font-size="20pt" fo:hyphenate="false"/>
    </style:style>
    <style:style style:name="P16" style:family="paragraph">
      <loext:graphic-properties draw:fill="none"/>
      <style:paragraph-properties fo:margin-left="0cm" fo:margin-right="0cm" fo:margin-top="0cm" fo:margin-bottom="0.071cm" fo:line-height="9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20pt" fo:hyphenate="false"/>
    </style:style>
    <style:style style:name="P17" style:family="paragraph">
      <style:paragraph-properties fo:margin-left="0cm" fo:margin-right="0cm" fo:margin-top="0cm" fo:margin-bottom="0.071cm" fo:line-height="100%" fo:text-align="start" fo:text-indent="0cm" style:punctuation-wrap="hanging" loext:tab-stop-distance="2.54cm" style:writing-mode="lr-tb">
        <style:tab-stops/>
      </style:paragraph-properties>
      <style:text-properties fo:font-size="20pt" fo:hyphenate="false"/>
    </style:style>
    <style:style style:name="P18" style:family="paragraph">
      <loext:graphic-properties draw:fill="none"/>
      <style:paragraph-properties fo:margin-left="0cm" fo:margin-right="0cm" fo:margin-top="0cm" fo:margin-bottom="0.071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20pt" fo:hyphenate="false"/>
    </style:style>
    <style:style style:name="P19" style:family="paragraph">
      <style:paragraph-properties fo:margin-left="0cm" fo:margin-right="0cm" fo:margin-top="0cm" fo:margin-bottom="0cm" fo:line-height="85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0" style:family="paragraph">
      <loext:graphic-properties draw:fill="none"/>
      <style:paragraph-properties fo:text-align="center" style:font-independent-line-spacing="true"/>
      <style:text-properties fo:font-size="48pt"/>
    </style:style>
    <style:style style:name="P21" style:family="paragraph">
      <style:paragraph-properties fo:margin-left="0cm" fo:margin-right="0cm" fo:margin-top="0.423cm" fo:margin-bottom="0.071cm" fo:line-height="90%" fo:text-align="justify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2" style:family="paragraph">
      <loext:graphic-properties draw:fill="solid" draw:fill-color="#d34817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s" fo:country="P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3" style:family="paragraph">
      <loext:graphic-properties draw:fill="solid" draw:fill-color="#ef8c6a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s" fo:country="P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4" style:family="paragraph">
      <loext:graphic-properties draw:fill="solid" draw:fill-color="#c49f9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s" fo:country="P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5" style:family="paragraph">
      <loext:graphic-properties draw:fill="solid" draw:fill-color="#8b7b57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s" fo:country="P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6" style:family="paragraph">
      <loext:graphic-properties draw:fill="solid" draw:fill-color="#a6a1a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s" fo:country="P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7" style:family="paragraph">
      <loext:graphic-properties draw:fill="solid" draw:fill-color="#c7bba6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s" fo:country="P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8" style:family="paragraph">
      <style:paragraph-properties fo:margin-left="0cm" fo:margin-right="0cm" fo:margin-top="0.212cm" fo:margin-bottom="0.071cm" fo:line-height="9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9" style:family="paragraph">
      <style:paragraph-properties fo:margin-left="0cm" fo:margin-right="0cm" fo:margin-top="0cm" fo:margin-bottom="0.071cm" fo:line-height="9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0" style:family="paragraph">
      <style:paragraph-properties fo:margin-left="0cm" fo:margin-right="0cm" fo:margin-top="0.423cm" fo:margin-bottom="0.071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1" style:family="paragraph">
      <loext:graphic-properties draw:fill="none"/>
      <style:paragraph-properties fo:margin-left="0cm" fo:margin-right="0cm" fo:margin-top="0.212cm" fo:margin-bottom="0.071cm" fo:line-height="9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2" style:family="paragraph">
      <style:paragraph-properties fo:margin-left="0cm" fo:margin-right="0cm" fo:margin-top="0.212cm" fo:margin-bottom="0.071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3" style:family="paragraph">
      <style:paragraph-properties fo:margin-left="0cm" fo:margin-right="0cm" fo:margin-top="0.212cm" fo:margin-bottom="0.071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.423cm" fo:margin-bottom="0.071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loext:graphic-properties draw:fill="none"/>
      <style:paragraph-properties fo:text-align="center" style:font-independent-line-spacing="true"/>
      <style:text-properties fo:font-size="20pt"/>
    </style:style>
    <style:style style:name="P36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37" style:family="paragraph">
      <loext:graphic-properties draw:fill="none"/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38" style:family="paragraph">
      <loext:graphic-properties draw:fill="none"/>
      <style:paragraph-properties fo:margin-left="0cm" fo:margin-right="0cm" fo:margin-top="0.423cm" fo:margin-bottom="0.071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P39" style:family="paragraph">
      <loext:graphic-properties draw:fill="solid" draw:fill-color="#d34817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40" style:family="paragraph">
      <style:paragraph-properties fo:margin-left="0cm" fo:margin-right="0cm" fo:margin-top="0cm" fo:margin-bottom="0.185cm" fo:line-height="90%" fo:text-align="center" fo:text-indent="0cm" style:punctuation-wrap="hanging" loext:tab-stop-distance="1.852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1" style:family="paragraph">
      <loext:graphic-properties draw:fill="solid" draw:fill-color="#d34817"/>
      <style:paragraph-properties fo:margin-left="0cm" fo:margin-right="0cm" fo:margin-top="0cm" fo:margin-bottom="0.185cm" fo:line-height="90%" fo:text-align="center" fo:text-indent="0cm" style:punctuation-wrap="hanging" loext:tab-stop-distance="1.852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2" style:family="paragraph">
      <loext:graphic-properties draw:fill="solid" draw:fill-color="#a28e6a"/>
      <style:paragraph-properties fo:margin-left="0cm" fo:margin-right="0cm" fo:margin-top="0cm" fo:margin-bottom="0.185cm" fo:line-height="90%" fo:text-align="center" fo:text-indent="0cm" style:punctuation-wrap="hanging" loext:tab-stop-distance="1.852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3" style:family="paragraph">
      <loext:graphic-properties draw:fill="solid" draw:fill-color="#956251"/>
      <style:paragraph-properties fo:margin-left="0cm" fo:margin-right="0cm" fo:margin-top="0cm" fo:margin-bottom="0.185cm" fo:line-height="90%" fo:text-align="center" fo:text-indent="0cm" style:punctuation-wrap="hanging" loext:tab-stop-distance="1.852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 Light" fo:font-size="66pt" fo:letter-spacing="-0.018cm" fo:language="es" fo:country="MX" fo:font-style="normal" style:text-underline-style="none" fo:font-weight="normal" fo:background-color="transparent" style:font-size-asian="66pt" style:font-style-asian="normal" style:font-weight-asian="normal" style:font-size-complex="66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" style:family="text">
      <style:text-properties fo:text-transform="uppercase" fo:color="#696464" loext:opacity="100%" style:text-outline="false" style:text-line-through-style="none" style:text-line-through-type="none" style:text-position="0% 100%" style:font-name="Calibri Light" fo:font-size="24pt" fo:letter-spacing="0.071cm" fo:language="es" fo:country="P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2" loext:color-type="theme"/>
      </style:text-properties>
    </style:style>
    <style:style style:name="T3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 Light" fo:font-size="48pt" fo:letter-spacing="-0.018cm" fo:language="es" fo:country="PE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s" fo:country="MX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20pt" fo:letter-spacing="normal" fo:language="es" fo:country="P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6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20pt" fo:letter-spacing="normal" fo:language="es" fo:country="P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7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20pt" fo:letter-spacing="normal" fo:language="es" fo:country="PE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8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 Light" fo:font-size="36pt" fo:letter-spacing="-0.018cm" fo:language="es" fo:country="PE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s" fo:country="P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s" fo:country="P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11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 Light" fo:font-size="44pt" fo:letter-spacing="-0.018cm" fo:language="es" fo:country="P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s" fo:country="P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12pt" fo:letter-spacing="normal" fo:language="es" fo:country="MX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14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15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 Light" fo:font-size="48pt" fo:letter-spacing="-0.018cm" fo:language="es" fo:country="MX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16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 Light" fo:font-size="40pt" fo:letter-spacing="-0.018cm" fo:language="es" fo:country="PE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17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18pt" fo:letter-spacing="normal" fo:language="es" fo:country="P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18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18pt" fo:letter-spacing="normal" fo:language="es" fo:country="MX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19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20pt" fo:letter-spacing="normal" fo:language="es" fo:country="MX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5pt" fo:letter-spacing="normal" fo:language="es" fo:country="PE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T21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28pt" fo:letter-spacing="normal" fo:language="es" fo:country="MX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text:list-style style:name="L1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d34817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79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 ">
        <style:list-level-properties text:min-label-width="0.254cm"/>
        <style:text-properties fo:font-family="Calibri" style:font-family-generic="swiss" style:font-pitch="variable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5cm"/>
        <style:text-properties fo:font-family="Arial" style:font-family-generic="swiss" style:font-pitch="variable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5cm"/>
        <style:text-properties fo:font-family="Arial" style:font-family-generic="swiss" style:font-pitch="variable" fo:color="#d34817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5cm"/>
        <style:text-properties fo:color="#d34817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5cm"/>
        <style:text-properties fo:color="#d34817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d34817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Introducción, entorno de los negocios internacionales y la inte" draw:style-name="dp1" draw:master-page-name="Diapositiva_20_de_20_título" presentation:presentation-page-layout-name="AL1T0">
        <draw:frame draw:name="Título 1" presentation:style-name="pr1" draw:text-style-name="P2" draw:layer="layout" svg:width="27.939cm" svg:height="9.905cm" svg:x="3.048cm" svg:y="2.108cm" presentation:class="title" presentation:user-transformed="true">
          <draw:text-box>
            <text:p text:style-name="P1"><text:span text:style-name="T1">Introducción, entorno de los negocios internacionales y la inteligencia comercial</text:span></text:p>
          </draw:text-box>
        </draw:frame>
        <draw:frame draw:name="Subtítulo 2" presentation:style-name="pr2" draw:text-style-name="P4" draw:layer="layout" svg:width="27.939cm" svg:height="3.174cm" svg:x="3.056cm" svg:y="12.377cm" presentation:class="subtitle" presentation:user-transformed="true">
          <draw:text-box>
            <text:p text:style-name="P3"><text:span text:style-name="T2">24 de abri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¿Qué entendemos por exportar?" draw:style-name="dp1" draw:master-page-name="Título_20_y_20_objetos" presentation:presentation-page-layout-name="AL2T11">
        <draw:frame draw:name="Título 1" presentation:style-name="pr4" draw:text-style-name="P6" draw:layer="layout" svg:width="27.939cm" svg:height="4.029cm" svg:x="3.048cm" svg:y="0.796cm" presentation:class="title" presentation:user-transformed="true">
          <draw:text-box>
            <text:p text:style-name="P1"><text:span text:style-name="T3">¿Qué entendemos por exportar?</text:span></text:p>
          </draw:text-box>
        </draw:frame>
        <draw:frame draw:name="Picture 2" draw:style-name="gr2" draw:text-style-name="P7" draw:layer="layout" svg:width="18.011cm" svg:height="10.552cm" svg:x="3.048cm" svg:y="5.512cm">
          <draw:image xlink:href="Pictures/10000000000002850000016B4FCAF68C.jpg" xlink:type="simple" xlink:show="embed" xlink:actuate="onLoad" draw:mime-type="image/jpeg">
            <text:p/>
          </draw:image>
        </draw:frame>
        <draw:custom-shape draw:name="CuadroTexto 3" draw:style-name="gr3" draw:text-style-name="P9" draw:layer="layout" svg:width="10.8cm" svg:height="6.345cm" svg:x="21.652cm" svg:y="7.225cm">
          <text:list text:style-name="L5">
            <text:list-item>
              <text:p text:style-name="P8"><text:span text:style-name="T4">Es sacar la mercancía del país? </text:span></text:p>
            </text:list-item>
            <text:list-item>
              <text:p text:style-name="P8"><text:span text:style-name="T4">Es vender al exterior? </text:span></text:p>
            </text:list-item>
            <text:list-item>
              <text:p text:style-name="P8"><text:span text:style-name="T4">Lo hace una agencia de aduanas? </text:span></text:p>
            </text:list-item>
            <text:list-item>
              <text:p text:style-name="P8"><text:span text:style-name="T4">Es un negocio que me vuelve millonario? </text:span></text:p>
            </text:list-item>
            <text:list-item>
              <text:p text:style-name="P8"><text:span text:style-name="T4">Es un trámite de aduanas? </text:span></text:p>
            </text:list-item>
            <text:list-item>
              <text:p text:style-name="P8"><text:span text:style-name="T4">Es la solución del desempleo? </text:span></text:p>
            </text:list-item>
            <text:list-item>
              <text:p text:style-name="P8"><text:span text:style-name="T4">Es el camino al desarrollo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¿Qué entendemos por exportar? " draw:style-name="dp1" draw:master-page-name="Título_20_y_20_objetos" presentation:presentation-page-layout-name="AL2T11">
        <draw:frame draw:name="Título 1" presentation:style-name="pr4" draw:text-style-name="P6" draw:layer="layout" svg:width="27.939cm" svg:height="4.029cm" svg:x="3.048cm" svg:y="0.796cm" presentation:class="title" presentation:user-transformed="true">
          <draw:text-box>
            <text:p text:style-name="P1"><text:span text:style-name="T3">¿Qué entendemos por exportar? </text:span></text:p>
          </draw:text-box>
        </draw:frame>
        <draw:frame draw:name="Marcador de contenido 2" presentation:style-name="pr6" draw:text-style-name="P11" draw:layer="layout" svg:width="15.229cm" svg:height="11.175cm" svg:x="15.758cm" svg:y="5.127cm" presentation:class="outline" presentation:user-transformed="true">
          <draw:text-box>
            <text:list text:style-name="L6">
              <text:list-item>
                <text:p text:style-name="P10"><text:span text:style-name="T5">Regulada por: </text:span></text:p>
              </text:list-item>
              <text:list-item>
                <text:p text:style-name="P10"><text:span text:style-name="T6">Ley General de Aduanas. Decreto Legislativo 1053 y su reglamento.</text:span></text:p>
              </text:list-item>
            </text:list>
            <text:p text:style-name="P10"><text:span text:style-name="T6"/></text:p>
            <text:list text:continue-numbering="true" text:style-name="L6">
              <text:list-item>
                <text:p text:style-name="P10"><text:span text:style-name="T5">Articulo 60°.-</text:span><text:span text:style-name="T6"> Exportación definitiva</text:span></text:p>
              </text:list-item>
              <text:list-item>
                <text:p text:style-name="P10"><text:span text:style-name="T7">“</text:span><text:span text:style-name="T7">Régimen aduanero que permite la salida del territorio aduanero de las mercancías nacionales o nacionalizadas para su uso o consumo definitivo en el exterior.</text:span></text:p>
              </text:list-item>
              <text:list-item>
                <text:p text:style-name="P10"><text:span text:style-name="T7">La exportación definitiva o está afecta a ningún tributo”</text:span></text:p>
              </text:list-item>
            </text:list>
          </draw:text-box>
        </draw:frame>
        <draw:frame draw:name="Picture 2" draw:style-name="gr4" draw:text-style-name="P7" draw:layer="layout" svg:width="12.243cm" svg:height="9.89cm" svg:x="3.048cm" svg:y="5.82cm">
          <draw:image xlink:href="Pictures/10000000000003840000026C4A85641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eptos importantes" draw:style-name="dp1" draw:master-page-name="Título_20_y_20_objetos" presentation:presentation-page-layout-name="AL2T11">
        <draw:frame draw:name="Título 1" presentation:style-name="pr4" draw:text-style-name="P6" draw:layer="layout" svg:width="27.939cm" svg:height="4.029cm" svg:x="3.048cm" svg:y="0.796cm" presentation:class="title" presentation:user-transformed="true">
          <draw:text-box>
            <text:p text:style-name="P1"><text:span text:style-name="T3">Conceptos importantes</text:span></text:p>
          </draw:text-box>
        </draw:frame>
        <draw:frame draw:name="Marcador de contenido 2" presentation:style-name="pr6" draw:text-style-name="P11" draw:layer="layout" svg:width="27.939cm" svg:height="8.608cm" svg:x="3.048cm" svg:y="7.694cm" presentation:class="outline" presentation:user-transformed="true">
          <draw:text-box>
            <text:list text:style-name="L7">
              <text:list-item>
                <text:p text:style-name="P10"><text:span text:style-name="T6">Partida Arancelaria</text:span></text:p>
              </text:list-item>
              <text:list-item>
                <text:p text:style-name="P10"><text:span text:style-name="T6">Arancel</text:span></text:p>
              </text:list-item>
              <text:list-item>
                <text:p text:style-name="P10"><text:span text:style-name="T6">Preferencia Arancelaria</text:span></text:p>
              </text:list-item>
              <text:list-item>
                <text:p text:style-name="P10"><text:span text:style-name="T6">Incoterms</text:span></text:p>
              </text:list-item>
              <text:list-item>
                <text:p text:style-name="P10"><text:span text:style-name="T6">Medidas Arancelarias</text:span></text:p>
              </text:list-item>
              <text:list-item>
                <text:p text:style-name="P10"><text:span text:style-name="T6">Medidas no Arancelari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¿Porqué exportar?" draw:style-name="dp1" draw:master-page-name="Título_20_y_20_objetos" presentation:presentation-page-layout-name="AL2T11">
        <draw:frame draw:name="Título 1" presentation:style-name="pr7" draw:text-style-name="P6" xml:id="id1" draw:id="id1" draw:layer="layout" svg:width="10.223cm" svg:height="2.673cm" svg:x="4.868cm" svg:y="6.98cm" presentation:class="title" presentation:user-transformed="true">
          <draw:text-box>
            <text:p text:style-name="P1"><text:span text:style-name="T8">¿Porqué exportar?</text:span></text:p>
          </draw:text-box>
        </draw:frame>
        <draw:custom-shape draw:name="CuadroTexto 3" draw:style-name="gr5" draw:text-style-name="P9" xml:id="id3" draw:id="id3" draw:layer="layout" svg:width="9.662cm" svg:height="1.096cm" svg:x="18.671cm" svg:y="5.49cm">
          <text:p text:style-name="P8"><text:span text:style-name="T9">Diversificación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" draw:style-name="gr6" draw:text-style-name="P9" xml:id="id4" draw:id="id4" draw:layer="layout" svg:width="9.662cm" svg:height="1.096cm" svg:x="18.671cm" svg:y="7.572cm">
          <text:p text:style-name="P8"><text:span text:style-name="T9">Generación genuina de divisas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5" draw:style-name="gr7" draw:text-style-name="P9" xml:id="id5" draw:id="id5" draw:layer="layout" svg:width="9.662cm" svg:height="1.096cm" svg:x="18.671cm" svg:y="9.65cm">
          <text:p text:style-name="P8"><text:span text:style-name="T9">Crecimiento económico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" draw:style-name="gr8" draw:text-style-name="P13" draw:layer="layout" svg:width="28.207cm" svg:height="0.648cm" svg:x="3.181cm" svg:y="4.587cm">
          <text:p text:style-name="P12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ector recto de flecha 10" draw:style-name="gr9" draw:text-style-name="P7" draw:layer="layout" draw:type="line" svg:x1="15.092cm" svg:y1="8.316cm" svg:x2="18.174cm" svg:y2="6.109cm" draw:start-shape="id1" draw:start-glue-point="1" svg:d="M15092 8316l3082-2207" svg:viewBox="0 0 3083 2208">
          <text:p/>
        </draw:connector>
        <draw:connector draw:name="Conector recto de flecha 11" draw:style-name="gr9" draw:text-style-name="P7" draw:layer="layout" draw:type="line" svg:x1="15.092cm" svg:y1="8.316cm" svg:x2="18.174cm" svg:y2="8.064cm" draw:start-shape="id1" draw:start-glue-point="1" svg:d="M15092 8316l3082-252" svg:viewBox="0 0 3083 253">
          <text:p/>
        </draw:connector>
        <draw:connector draw:name="Conector recto de flecha 14" draw:style-name="gr9" draw:text-style-name="P7" draw:layer="layout" draw:type="line" svg:x1="15.092cm" svg:y1="8.316cm" svg:x2="18.174cm" svg:y2="10.205cm" draw:start-shape="id1" draw:start-glue-point="1" svg:d="M15092 8316l3082 1889" svg:viewBox="0 0 3083 1890">
          <text:p/>
        </draw:connector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¿Quienes pueden exportar?" draw:style-name="dp1" draw:master-page-name="Título_20_y_20_objetos" presentation:presentation-page-layout-name="AL2T11">
        <draw:frame draw:name="Título 1" presentation:style-name="pr4" draw:text-style-name="P6" draw:layer="layout" svg:width="27.939cm" svg:height="4.029cm" svg:x="3.048cm" svg:y="0.796cm" presentation:class="title" presentation:user-transformed="true">
          <draw:text-box>
            <text:p text:style-name="P1"><text:span text:style-name="T3">¿Quienes pueden exportar</text:span><text:span text:style-name="T11">?</text:span></text:p>
          </draw:text-box>
        </draw:frame>
        <draw:frame draw:name="Picture 2" draw:style-name="gr2" draw:text-style-name="P7" draw:layer="layout" svg:width="5.512cm" svg:height="5.217cm" svg:x="7.559cm" svg:y="8.506cm">
          <draw:image xlink:href="Pictures/10000001000003480000031B0CD7115E.png" xlink:type="simple" xlink:show="embed" xlink:actuate="onLoad" draw:mime-type="image/png">
            <text:p/>
          </draw:image>
          <svg:desc>Job Png - Que Es Una Persona Natural Y Juridica, Transparent Png -  800x800(#1749336) - PngFind</svg:desc>
        </draw:frame>
        <draw:custom-shape draw:name="CuadroTexto 3" draw:style-name="gr10" draw:text-style-name="P9" draw:layer="layout" svg:width="4.622cm" svg:height="1.011cm" svg:x="8.004cm" svg:y="13.369cm">
          <text:p text:style-name="P8"><text:span text:style-name="T12">Persona Natur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7" draw:layer="layout" svg:width="7.655cm" svg:height="6.124cm" svg:x="16.933cm" svg:y="7.561cm">
          <draw:image xlink:href="Pictures/1000000100000384000002D02055DACD.png" xlink:type="simple" xlink:show="embed" xlink:actuate="onLoad" draw:mime-type="image/png">
            <text:p/>
          </draw:image>
          <svg:desc>Persona Jurídica, Persona, Negocio imagen png - imagen transparente  descarga gratuita</svg:desc>
        </draw:frame>
        <draw:custom-shape draw:name="CuadroTexto 6" draw:style-name="gr11" draw:text-style-name="P9" draw:layer="layout" svg:width="4.656cm" svg:height="1.011cm" svg:x="18.452cm" svg:y="13.388cm">
          <text:p text:style-name="P8"><text:span text:style-name="T12">Persona Juríd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¿Qué necesito para exportar?" draw:style-name="dp1" draw:master-page-name="Título_20_y_20_objetos" presentation:presentation-page-layout-name="AL2T11">
        <draw:frame draw:name="Título 1" presentation:style-name="pr4" draw:text-style-name="P6" draw:layer="layout" svg:width="27.939cm" svg:height="4.029cm" svg:x="3.048cm" svg:y="0.796cm" presentation:class="title" presentation:user-transformed="true">
          <draw:text-box>
            <text:p text:style-name="P1"><text:span text:style-name="T3">¿Qué necesito para exportar?</text:span></text:p>
          </draw:text-box>
        </draw:frame>
        <draw:frame draw:name="Picture 2" draw:style-name="gr2" draw:text-style-name="P7" xml:id="id8" draw:id="id8" draw:layer="layout" svg:width="4.458cm" svg:height="4.458cm" svg:x="14.397cm" svg:y="7.688cm">
          <draw:image xlink:href="Pictures/100000010000020000000200838A945D.png" xlink:type="simple" xlink:show="embed" xlink:actuate="onLoad" draw:mime-type="image/png">
            <text:p/>
          </draw:image>
          <svg:desc>Mercado - Iconos gratis de comercio</svg:desc>
        </draw:frame>
        <draw:frame draw:name="Picture 4" draw:style-name="gr2" draw:text-style-name="P7" xml:id="id10" draw:id="id10" draw:layer="layout" svg:width="4.641cm" svg:height="4.641cm" svg:x="24.634cm" svg:y="7.688cm">
          <draw:image xlink:href="Pictures/100000010000020000000200D8E76D9D.png" xlink:type="simple" xlink:show="embed" xlink:actuate="onLoad" draw:mime-type="image/png">
            <text:p/>
          </draw:image>
          <svg:desc>Producto - Iconos gratis de moda</svg:desc>
        </draw:frame>
        <draw:frame draw:name="Picture 6" draw:style-name="gr2" draw:text-style-name="P7" xml:id="id6" draw:id="id6" draw:layer="layout" svg:width="4.458cm" svg:height="4.458cm" svg:x="4.161cm" svg:y="7.688cm">
          <draw:image xlink:href="Pictures/100000010000020000000200CDE06534.png" xlink:type="simple" xlink:show="embed" xlink:actuate="onLoad" draw:mime-type="image/png">
            <text:p/>
          </draw:image>
          <svg:desc>Empresa - Iconos gratis de negocio</svg:desc>
        </draw:frame>
        <draw:custom-shape draw:name="CuadroTexto 3" draw:style-name="gr12" draw:text-style-name="P9" xml:id="id7" draw:id="id7" draw:layer="layout" svg:width="2.734cm" svg:height="1.011cm" svg:x="5.024cm" svg:y="6.087cm">
          <text:p text:style-name="P8"><text:span text:style-name="T12">Empre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" draw:style-name="gr13" draw:text-style-name="P9" xml:id="id9" draw:id="id9" draw:layer="layout" svg:width="2.806cm" svg:height="1.011cm" svg:x="15.224cm" svg:y="6.087cm">
          <text:p text:style-name="P8"><text:span text:style-name="T12">Merc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8" draw:style-name="gr14" draw:text-style-name="P9" xml:id="id11" draw:id="id11" draw:layer="layout" svg:width="2.853cm" svg:height="1.011cm" svg:x="25.528cm" svg:y="6.087cm">
          <text:p text:style-name="P8"><text:span text:style-name="T12">Produc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echa: a la derecha 4" draw:style-name="gr15" draw:text-style-name="P14" xml:id="id12" draw:id="id12" draw:layer="layout" svg:width="2.81cm" svg:height="1.47cm" svg:x="10.407cm" svg:y="9.182cm">
          <text:p text:style-name="P12"><text:span text:style-name="T10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echa: a la derecha 10" draw:style-name="gr15" draw:text-style-name="P14" xml:id="id13" draw:id="id13" draw:layer="layout" svg:width="2.81cm" svg:height="1.47cm" svg:x="20.649cm" svg:y="8.869cm">
          <text:p text:style-name="P12"><text:span text:style-name="T10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Marcador de contenido 2" draw:style-name="gr16" draw:text-style-name="P16" draw:layer="layout" svg:width="7.587cm" svg:height="3.372cm" svg:x="2.818cm" svg:y="12.643cm">
          <text:list text:style-name="L10">
            <text:list-item>
              <text:p text:style-name="P15"><text:span text:style-name="T13">Contar con un Plan Estratégico de exportaciones. </text:span></text:p>
            </text:list-item>
            <text:list-item>
              <text:p text:style-name="P15"><text:span text:style-name="T13">Contar con una infraestructura adecuada. </text:span></text:p>
            </text:list-item>
            <text:list-item>
              <text:p text:style-name="P15"><text:span text:style-name="T13">Contar con un nivel de producción constante y sostenida. </text:span></text:p>
            </text:list-item>
            <text:list-item>
              <text:p text:style-name="P15"><text:span text:style-name="T13">Contar con un personal adecuado. </text:span></text:p>
            </text:list-item>
            <text:list-item>
              <text:p text:style-name="P15"><text:span text:style-name="T13">Buen manejo financier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contenido 2" draw:style-name="gr17" draw:text-style-name="P16" draw:layer="layout" svg:width="8.055cm" svg:height="4.029cm" svg:x="13.511cm" svg:y="12.643cm">
          <text:list text:style-name="L10">
            <text:list-item>
              <text:p text:style-name="P15"><text:span text:style-name="T14">¿Conoce su mercado de destino? </text:span></text:p>
            </text:list-item>
            <text:list-item>
              <text:p text:style-name="P15"><text:span text:style-name="T14">¿A dónde exporto mis productos? </text:span></text:p>
            </text:list-item>
            <text:list-item>
              <text:p text:style-name="P15"><text:span text:style-name="T14">¿Qué países compran mi producto y cuales tienen un mejor potencial para lograrlo? </text:span></text:p>
            </text:list-item>
            <text:list-item>
              <text:p text:style-name="P15"><text:span text:style-name="T14">¿Conoce su legislación? </text:span></text:p>
            </text:list-item>
            <text:list-item>
              <text:p text:style-name="P15"><text:span text:style-name="T14">¿Conoce las principales ciudades, puntos de entrada (puertos, aeropuertos, etc.)? </text:span></text:p>
            </text:list-item>
            <text:list-item>
              <text:p text:style-name="P15"><text:span text:style-name="T14">¿Conoce su nicho de mercado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contenido 2" draw:style-name="gr18" draw:text-style-name="P18" draw:layer="layout" svg:width="8.249cm" svg:height="4.641cm" svg:x="23.192cm" svg:y="12.643cm">
          <text:list text:style-name="L10">
            <text:list-item>
              <text:p text:style-name="P17"><text:span text:style-name="T14">¿Cuento con oferta exportable? ¿Mi producto es competitivo? </text:span></text:p>
            </text:list-item>
            <text:list-item>
              <text:p text:style-name="P17"><text:span text:style-name="T14">¿Cuento con Sistemas de calidad y tecnologías adecuadas? </text:span></text:p>
            </text:list-item>
            <text:list-item>
              <text:p text:style-name="P17"><text:span text:style-name="T14">¿Mi precio es competitivo? </text:span></text:p>
            </text:list-item>
            <text:list-item>
              <text:p text:style-name="P17"><text:span text:style-name="T14">¿Mi producto es diferenciado? </text:span></text:p>
            </text:list-item>
            <text:list-item>
              <text:p text:style-name="P17"><text:span text:style-name="T14">¿Cuál es la capacidad de adaptabilidad de mi producto en el exterior? </text:span></text:p>
            </text:list-item>
            <text:list-item>
              <text:p text:style-name="P17"><text:span text:style-name="T14">¿Cuento con capacidad de producción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¿Qué es la inteligencia Comercial?" draw:style-name="dp1" draw:master-page-name="Título_20_y_20_objetos" presentation:presentation-page-layout-name="AL2T11">
        <draw:frame draw:name="Título 1" presentation:style-name="pr4" draw:text-style-name="P20" draw:layer="layout" svg:width="27.939cm" svg:height="2.014cm" svg:x="2.963cm" svg:y="8.518cm" presentation:class="title" presentation:user-transformed="true">
          <draw:text-box>
            <text:p text:style-name="P19"><text:span text:style-name="T15">¿Qué es la inteligencia Comercial?</text:span></text:p>
          </draw:text-box>
        </draw:frame>
        <draw:custom-shape draw:name="Rectángulo 3" draw:style-name="gr8" draw:text-style-name="P13" draw:layer="layout" svg:width="28.309cm" svg:height="0.714cm" svg:x="3.083cm" svg:y="4.488cm">
          <text:p text:style-name="P12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¿Qué es la Inteligencia Comercial?" draw:style-name="dp1" draw:master-page-name="Título_20_y_20_objetos" presentation:presentation-page-layout-name="AL2T11">
        <draw:frame draw:name="Título 1" presentation:style-name="pr7" draw:text-style-name="P6" draw:layer="layout" svg:width="27.939cm" svg:height="4.029cm" svg:x="3.048cm" svg:y="0.796cm" presentation:class="title" presentation:user-transformed="true">
          <draw:text-box>
            <text:p text:style-name="P1"><text:span text:style-name="T16">¿Qué es la Inteligencia Comercial?</text:span></text:p>
          </draw:text-box>
        </draw:frame>
        <draw:frame draw:name="Marcador de contenido 2" presentation:style-name="pr6" draw:text-style-name="P11" draw:layer="layout" svg:width="10.85cm" svg:height="7.079cm" svg:x="4.267cm" svg:y="8.399cm" presentation:class="outline" presentation:user-transformed="true">
          <draw:text-box>
            <text:list text:style-name="L6">
              <text:list-item>
                <text:p text:style-name="P21"><text:span text:style-name="T6">Recopilar, limpiar, ordenar, procesar e interpretar información para armar estrategias y tomar decisiones.</text:span></text:p>
              </text:list-item>
            </text:list>
          </draw:text-box>
        </draw:frame>
        <draw:custom-shape draw:name="Flecha: curvada hacia abajo 5" draw:style-name="gr15" draw:text-style-name="P22" draw:layer="layout" svg:width="15.363cm" svg:height="14.199cm" draw:transform="rotate (1.82317093663328) translate (21.193cm 24.415cm)">
          <text:p text:style-name="P12"><text:span text:style-name="T12"/></text:p>
          <draw:enhanced-geometry draw:mirror-horizontal="false" draw:mirror-vertical="false" draw:text-areas="0 0 ?f44 ?f43" svg:viewBox="0 0 0 0" draw:type="ooxml-curvedDownArrow" draw:modifiers="17783 36364 22249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aximum="$1" draw:handle-range-x-minimum="0"/>
            <draw:handle draw:handle-position="?f28 ?f43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Elipse 8" draw:style-name="gr19" draw:text-style-name="P23" draw:layer="layout" svg:width="0.297cm" svg:height="0.291cm" svg:x="19.89cm" svg:y="15.011cm">
          <text:p text:style-name="P12"><text:span text:style-name="T10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adroTexto 10" draw:style-name="gr20" draw:text-style-name="P9" draw:layer="layout" svg:width="1.98cm" svg:height="1.011cm" svg:x="16.766cm" svg:y="14.508cm">
          <text:p text:style-name="P8"><text:span text:style-name="T12">Da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1" draw:style-name="gr21" draw:text-style-name="P9" draw:layer="layout" svg:width="3.623cm" svg:height="1.011cm" svg:x="16.543cm" svg:y="12.227cm">
          <text:p text:style-name="P8"><text:span text:style-name="T12">Inform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2" draw:style-name="gr22" draw:text-style-name="P9" draw:layer="layout" svg:width="4.097cm" svg:height="1.011cm" svg:x="18.38cm" svg:y="10.186cm">
          <text:p text:style-name="P8"><text:span text:style-name="T12">Conocimi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" draw:style-name="gr23" draw:text-style-name="P9" draw:layer="layout" svg:width="2.218cm" svg:height="1.011cm" svg:x="25.897cm" svg:y="7.373cm">
          <text:p text:style-name="P8"><text:span text:style-name="T12">Ac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4" draw:style-name="gr24" draw:text-style-name="P9" draw:layer="layout" svg:width="2.683cm" svg:height="1.011cm" svg:x="22.345cm" svg:y="8.499cm">
          <text:p text:style-name="P8"><text:span text:style-name="T12">Decis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15" draw:style-name="gr25" draw:text-style-name="P24" draw:layer="layout" svg:width="0.503cm" svg:height="0.498cm" svg:x="21.185cm" svg:y="13.253cm">
          <text:p text:style-name="P12"><text:span text:style-name="T10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6" draw:style-name="gr26" draw:text-style-name="P25" draw:layer="layout" svg:width="0.672cm" svg:height="0.647cm" svg:x="23.595cm" svg:y="11.212cm">
          <text:p text:style-name="P12"><text:span text:style-name="T10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7" draw:style-name="gr27" draw:text-style-name="P26" draw:layer="layout" svg:width="0.882cm" svg:height="0.885cm" svg:x="26.069cm" svg:y="9.78cm">
          <text:p text:style-name="P12"><text:span text:style-name="T10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8" draw:style-name="gr28" draw:text-style-name="P27" draw:layer="layout" svg:width="1.332cm" svg:height="1.331cm" svg:x="28.501cm" svg:y="8.679cm">
          <text:p text:style-name="P12"><text:span text:style-name="T10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vestigación     &#9;vs. &#9;     Inteligencia" draw:style-name="dp1" draw:master-page-name="Título_20_y_20_objetos" presentation:presentation-page-layout-name="AL2T11">
        <draw:frame draw:name="Título 1" presentation:style-name="pr4" draw:text-style-name="P6" draw:layer="layout" svg:width="27.939cm" svg:height="4.029cm" svg:x="3.048cm" svg:y="0.796cm" presentation:class="title" presentation:user-transformed="true">
          <draw:text-box>
            <text:p text:style-name="P1"><text:span text:style-name="T3">Investigación <text:s text:c="4"/></text:span><text:span text:style-name="T3"><text:tab/></text:span><text:span text:style-name="T3">vs. </text:span><text:span text:style-name="T3"><text:tab/></text:span><text:span text:style-name="T3"> <text:s text:c="4"/>Inteligencia</text:span></text:p>
          </draw:text-box>
        </draw:frame>
        <draw:custom-shape draw:name="CuadroTexto 3" draw:style-name="gr29" draw:text-style-name="P31" draw:layer="layout" svg:width="14.24cm" svg:height="11.499cm" svg:x="17.274cm" svg:y="5.623cm">
          <text:list text:style-name="L10">
            <text:list-item>
              <text:p text:style-name="P28"><text:span text:style-name="T17">Proceso continuo de búsqueda y análisis de información.</text:span></text:p>
            </text:list-item>
          </text:list>
          <text:p text:style-name="P28"><text:span text:style-name="T17"/></text:p>
          <text:list text:continue-numbering="true" text:style-name="L10">
            <text:list-item>
              <text:p text:style-name="P28"><text:span text:style-name="T17">Alineado al proceso de toma de decisiones del cliente y a su planes tácticos y estratégicos. </text:span></text:p>
            </text:list-item>
          </text:list>
          <text:p text:style-name="P28"><text:span text:style-name="T17"/></text:p>
          <text:list text:continue-numbering="true" text:style-name="L10">
            <text:list-item>
              <text:p text:style-name="P28"><text:span text:style-name="T17">Utiliza información de la demanda, la oferta y del entorno del mercado. (Las empresas no son islas).</text:span></text:p>
            </text:list-item>
          </text:list>
          <text:p text:style-name="P28"><text:span text:style-name="T17"/></text:p>
          <text:list text:continue-numbering="true" text:style-name="L10">
            <text:list-item>
              <text:p text:style-name="P29"><text:span text:style-name="T17">Previene las amenazas (se proyecta al futuro)</text:span></text:p>
            </text:list-item>
          </text:list>
          <text:p text:style-name="P30"><text:span text:style-name="T17"/></text:p>
          <text:list text:continue-numbering="true" text:style-name="L10">
            <text:list-item>
              <text:p text:style-name="P30"><text:span text:style-name="T17">Establece una fuerte diferencia competitiva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Marcador de contenido 5" presentation:style-name="pr8" draw:text-style-name="P35" draw:layer="layout" svg:width="11.836cm" svg:height="11.499cm" svg:x="1.48cm" svg:y="5.623cm" presentation:class="outline" presentation:user-transformed="true">
          <draw:text-box>
            <text:list text:style-name="L7">
              <text:list-item>
                <text:p text:style-name="P32"><text:span text:style-name="T18">Recoge información en un momento en particular. No hay análisis</text:span></text:p>
              </text:list-item>
            </text:list>
            <text:p text:style-name="P32"><text:span text:style-name="T18"/></text:p>
            <text:list text:continue-numbering="true" text:style-name="L7">
              <text:list-item>
                <text:p text:style-name="P32"><text:span text:style-name="T18">Alineado al proceso de toma de decisiones de marketing.</text:span></text:p>
              </text:list-item>
            </text:list>
            <text:p text:style-name="P32"><text:span text:style-name="T18"/></text:p>
            <text:list text:continue-numbering="true" text:style-name="L7">
              <text:list-item>
                <text:p text:style-name="P32"><text:span text:style-name="T18">Utiliza información de la demanda.</text:span></text:p>
              </text:list-item>
            </text:list>
            <text:p text:style-name="P33"><text:span text:style-name="T18"/></text:p>
            <text:list text:continue-numbering="true" text:style-name="L7">
              <text:list-item>
                <text:p text:style-name="P34"><text:span text:style-name="T18">Generalmente se ocupa de resolver problemas que ya se han presentado</text:span></text:p>
              </text:list-item>
            </text:list>
            <text:p text:style-name="P33"><text:span text:style-name="T18"/></text:p>
            <text:list text:continue-numbering="true" text:style-name="L7">
              <text:list-item>
                <text:p text:style-name="P33"><text:span text:style-name="T18">Muchos la hacen.</text:span></text:p>
              </text:list-item>
            </text:list>
            <text:p text:style-name="P33"><text:span text:style-name="T17"/></text:p>
          </draw:text-box>
        </draw:frame>
        <draw:connector draw:name="Conector recto 4" draw:style-name="gr30" draw:text-style-name="P7" draw:layer="layout" draw:type="line" svg:x1="14.722cm" svg:y1="6.263cm" svg:x2="16.374cm" svg:y2="6.263cm" svg:d="M14722 6263h1652" svg:viewBox="0 0 1653 1">
          <text:p/>
        </draw:connector>
        <draw:connector draw:name="Conector recto 7" draw:style-name="gr30" draw:text-style-name="P7" draw:layer="layout" draw:type="line" svg:x1="14.722cm" svg:y1="8.807cm" svg:x2="16.374cm" svg:y2="8.807cm" svg:d="M14722 8807h1652" svg:viewBox="0 0 1653 1">
          <text:p/>
        </draw:connector>
        <draw:connector draw:name="Conector recto 8" draw:style-name="gr30" draw:text-style-name="P7" draw:layer="layout" draw:type="line" svg:x1="14.722cm" svg:y1="11.356cm" svg:x2="16.374cm" svg:y2="11.356cm" svg:d="M14722 11356h1652" svg:viewBox="0 0 1653 1">
          <text:p/>
        </draw:connector>
        <draw:connector draw:name="Conector recto 9" draw:style-name="gr30" draw:text-style-name="P7" draw:layer="layout" draw:type="line" svg:x1="14.722cm" svg:y1="13.719cm" svg:x2="16.374cm" svg:y2="13.719cm" svg:d="M14722 13719h1652" svg:viewBox="0 0 1653 1">
          <text:p/>
        </draw:connector>
        <draw:connector draw:name="Conector recto 10" draw:style-name="gr30" draw:text-style-name="P7" draw:layer="layout" draw:type="line" svg:x1="14.722cm" svg:y1="15.766cm" svg:x2="16.374cm" svg:y2="15.766cm" svg:d="M14722 15766h1652" svg:viewBox="0 0 1653 1">
          <text:p/>
        </draw:connecto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neficios de la Inteligencia Comercial" draw:style-name="dp1" draw:master-page-name="Título_20_y_20_objetos" presentation:presentation-page-layout-name="AL2T11">
        <draw:frame draw:name="Título 1" presentation:style-name="pr4" draw:text-style-name="P6" draw:layer="layout" svg:width="27.939cm" svg:height="4.029cm" svg:x="3.048cm" svg:y="0.796cm" presentation:class="title" presentation:user-transformed="true">
          <draw:text-box>
            <text:p text:style-name="P1"><text:span text:style-name="T3">Beneficios de la Inteligencia Comercial</text:span></text:p>
          </draw:text-box>
        </draw:frame>
        <draw:frame draw:name="Marcador de contenido 2" presentation:style-name="pr8" draw:text-style-name="P11" draw:layer="layout" svg:width="27.939cm" svg:height="9.89cm" svg:x="3.048cm" svg:y="6.412cm" presentation:class="outline" presentation:user-transformed="true">
          <draw:text-box>
            <text:list text:style-name="L7">
              <text:list-item>
                <text:p text:style-name="P10"><text:span text:style-name="T19">Reduce riesgos del mercado.</text:span></text:p>
              </text:list-item>
              <text:list-item>
                <text:p text:style-name="P10"><text:span text:style-name="T19">Identifica oportunidades de negocio antes <text:s/>o mejor que la competencia.</text:span></text:p>
              </text:list-item>
              <text:list-item>
                <text:p text:style-name="P10"><text:span text:style-name="T19">Anticipa los cambios en el mercado</text:span></text:p>
              </text:list-item>
              <text:list-item>
                <text:p text:style-name="P10"><text:span text:style-name="T19">Brinda alta calidad de información sobre el cliente o competidor. </text:span></text:p>
              </text:list-item>
              <text:list-item>
                <text:p text:style-name="P10"><text:span text:style-name="T19">Mejora el conocimiento de la competencia.</text:span></text:p>
              </text:list-item>
              <text:list-item>
                <text:p text:style-name="P10"><text:span text:style-name="T19">Ayuda a la toma de decisiones.</text:span></text:p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rrores en Inteligencia de Mercados" draw:style-name="dp1" draw:master-page-name="Título_20_y_20_objetos" presentation:presentation-page-layout-name="AL2T11">
        <draw:frame draw:name="Título 1" presentation:style-name="pr4" draw:text-style-name="P6" draw:layer="layout" svg:width="27.939cm" svg:height="4.029cm" svg:x="3.048cm" svg:y="0.796cm" presentation:class="title" presentation:user-transformed="true">
          <draw:text-box>
            <text:p text:style-name="P1"><text:span text:style-name="T15">Errores en Inteligencia de Mercados</text:span></text:p>
          </draw:text-box>
        </draw:frame>
        <draw:frame draw:name="Marcador de contenido 2" presentation:style-name="pr6" draw:text-style-name="P11" draw:layer="layout" svg:width="27.939cm" svg:height="9.94cm" svg:x="3.048cm" svg:y="6.362cm" presentation:class="outline" presentation:user-transformed="true">
          <draw:text-box>
            <text:list text:style-name="L7">
              <text:list-item>
                <text:p text:style-name="P10"><text:span text:style-name="T19">No validar la información </text:span></text:p>
              </text:list-item>
              <text:list-item>
                <text:p text:style-name="P10"><text:span text:style-name="T19">No usar la información </text:span></text:p>
              </text:list-item>
              <text:list-item>
                <text:p text:style-name="P10"><text:span text:style-name="T19">Atender rumores u opiniones </text:span></text:p>
              </text:list-item>
              <text:list-item>
                <text:p text:style-name="P10"><text:span text:style-name="T19">Subestimar o sobre estimar en el análisis y conclusiones. </text:span></text:p>
              </text:list-item>
              <text:list-item>
                <text:p text:style-name="P10"><text:span text:style-name="T19">No preparar planes de contingenci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onentes para generar información" draw:style-name="dp1" draw:master-page-name="Título_20_y_20_objetos" presentation:presentation-page-layout-name="AL2T11">
        <draw:frame draw:name="Título 1" presentation:style-name="pr4" draw:text-style-name="P6" xml:id="id2" draw:id="id2" draw:layer="layout" svg:width="10.37cm" svg:height="4.61cm" svg:x="3.296cm" svg:y="6.691cm" presentation:class="title" presentation:user-transformed="true">
          <draw:text-box>
            <text:p text:style-name="P1"><text:span text:style-name="T16">Componentes para generar información</text:span></text:p>
          </draw:text-box>
        </draw:frame>
        <draw:frame draw:name="Marcador de contenido 2" presentation:style-name="pr6" draw:text-style-name="P11" draw:layer="layout" svg:width="15.427cm" svg:height="1.14cm" svg:x="17.685cm" svg:y="5.818cm" presentation:class="outline" presentation:user-transformed="true">
          <draw:text-box>
            <text:list text:style-name="L6">
              <text:list-item>
                <text:p text:style-name="P10"><text:span text:style-name="T6">Volumen de datos: Fuentes de Información</text:span></text:p>
              </text:list-item>
            </text:list>
          </draw:text-box>
        </draw:frame>
        <draw:custom-shape draw:name="Marcador de contenido 2" draw:style-name="gr31" draw:text-style-name="P37" draw:layer="layout" svg:width="15.427cm" svg:height="1.14cm" svg:x="18.092cm" svg:y="8.56cm">
          <text:p text:style-name="P36"><text:span text:style-name="T6">Metodología adecua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contenido 2" draw:style-name="gr32" draw:text-style-name="P37" draw:layer="layout" svg:width="15.427cm" svg:height="1.14cm" svg:x="18.092cm" svg:y="11.302cm">
          <text:p text:style-name="P36"><text:span text:style-name="T6">Análi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5" draw:style-name="gr15" draw:text-style-name="P14" draw:layer="layout" svg:width="0.126cm" svg:height="0.126cm" svg:x="17.622cm" svg:y="6.253cm">
          <text:p text:style-name="P12"><text:span text:style-name="T10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6" draw:style-name="gr15" draw:text-style-name="P14" draw:layer="layout" svg:width="0.126cm" svg:height="0.126cm" svg:x="17.622cm" svg:y="9.003cm">
          <text:p text:style-name="P12"><text:span text:style-name="T10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7" draw:style-name="gr15" draw:text-style-name="P14" draw:layer="layout" svg:width="0.126cm" svg:height="0.126cm" svg:x="17.685cm" svg:y="11.809cm">
          <text:p text:style-name="P12"><text:span text:style-name="T10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8" draw:style-name="gr8" draw:text-style-name="P13" draw:layer="layout" svg:width="27.89cm" svg:height="0.41cm" svg:x="3.296cm" svg:y="4.537cm">
          <text:p text:style-name="P12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ector recto de flecha 10" draw:style-name="gr9" draw:text-style-name="P7" draw:layer="layout" draw:type="line" svg:x1="13.667cm" svg:y1="8.996cm" svg:x2="17.278cm" svg:y2="6.384cm" draw:start-shape="id2" draw:start-glue-point="1" svg:d="M13667 8996l3611-2612" svg:viewBox="0 0 3612 2613">
          <text:p/>
        </draw:connector>
        <draw:connector draw:name="Conector recto de flecha 13" draw:style-name="gr9" draw:text-style-name="P7" draw:layer="layout" draw:type="line" svg:x1="13.667cm" svg:y1="8.996cm" svg:x2="17.278cm" svg:y2="9.028cm" draw:start-shape="id2" draw:start-glue-point="1" svg:d="M13667 8996l3611 32" svg:viewBox="0 0 3612 33">
          <text:p/>
        </draw:connector>
        <draw:connector draw:name="Conector recto de flecha 16" draw:style-name="gr9" draw:text-style-name="P7" draw:layer="layout" draw:type="line" svg:x1="13.667cm" svg:y1="8.996cm" svg:x2="17.278cm" svg:y2="11.757cm" draw:start-shape="id2" draw:start-glue-point="1" svg:d="M13667 8996l3611 2761" svg:viewBox="0 0 3612 2762">
          <text:p/>
        </draw:connecto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¿Cómo iniciar?" draw:style-name="dp1" draw:master-page-name="Título_20_y_20_objetos" presentation:presentation-page-layout-name="AL2T11">
        <draw:frame draw:name="Título 1" presentation:style-name="pr4" draw:text-style-name="P20" draw:layer="layout" svg:width="27.939cm" svg:height="4.029cm" svg:x="3.048cm" svg:y="6.685cm" presentation:class="title" presentation:user-transformed="true">
          <draw:text-box>
            <text:p text:style-name="P19"><text:span text:style-name="T3">¿Cómo iniciar?</text:span></text:p>
          </draw:text-box>
        </draw:frame>
        <draw:frame draw:name="Marcador de contenido 2" presentation:style-name="pr9" draw:text-style-name="P38" draw:layer="layout" svg:width="27.939cm" svg:height="11.175cm" svg:x="3.048cm" svg:y="5.127cm" presentation:class="outline" presentation:placeholder="true" presentation:user-transformed="true">
          <draw:text-box/>
        </draw:frame>
        <draw:custom-shape draw:name="Rectángulo 3" draw:style-name="gr8" draw:text-style-name="P13" draw:layer="layout" svg:width="28.309cm" svg:height="0.714cm" svg:x="3.083cm" svg:y="4.488cm">
          <text:p text:style-name="P12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ificación Arancelaria" draw:style-name="dp1" draw:master-page-name="Título_20_y_20_objetos" presentation:presentation-page-layout-name="AL2T11">
        <draw:frame draw:name="Título 1" presentation:style-name="pr4" draw:text-style-name="P6" draw:layer="layout" svg:width="27.939cm" svg:height="4.029cm" svg:x="3.048cm" svg:y="0.796cm" presentation:class="title" presentation:user-transformed="true">
          <draw:text-box>
            <text:p text:style-name="P1"><text:span text:style-name="T3">Clasificación Arancelaria</text:span></text:p>
          </draw:text-box>
        </draw:frame>
        <draw:frame draw:name="Picture 2" draw:style-name="gr33" draw:text-style-name="P7" draw:layer="layout" svg:width="20.567cm" svg:height="7.905cm" svg:x="6.263cm" svg:y="8.466cm">
          <draw:image xlink:href="Pictures/1000000000000234000001727E54F98E.jpg" xlink:type="simple" xlink:show="embed" xlink:actuate="onLoad" draw:mime-type="image/jpeg">
            <text:p/>
          </draw:image>
          <svg:desc>Elvenr graphic: junio 2013</svg:desc>
        </draw:frame>
        <draw:custom-shape draw:name="Rectángulo 5" draw:style-name="gr34" draw:text-style-name="P39" draw:layer="layout" svg:width="1.306cm" svg:height="2.416cm" svg:x="7.077cm" svg:y="5.228cm">
          <text:p text:style-name="P12"><text:span text:style-name="T1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7" draw:style-name="gr35" draw:text-style-name="P39" draw:layer="layout" svg:width="1.306cm" svg:height="2.416cm" svg:x="9.076cm" svg:y="5.228cm">
          <text:p text:style-name="P12"><text:span text:style-name="T10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8" draw:style-name="gr36" draw:text-style-name="P39" draw:layer="layout" svg:width="1.306cm" svg:height="2.416cm" svg:x="11.074cm" svg:y="5.228cm">
          <text:p text:style-name="P12"><text:span text:style-name="T10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9" draw:style-name="gr37" draw:text-style-name="P39" draw:layer="layout" svg:width="1.306cm" svg:height="2.416cm" svg:x="13.072cm" svg:y="5.228cm">
          <text:p text:style-name="P12"><text:span text:style-name="T1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0" draw:style-name="gr38" draw:text-style-name="P39" draw:layer="layout" svg:width="1.306cm" svg:height="2.416cm" svg:x="15.053cm" svg:y="5.228cm">
          <text:p text:style-name="P12"><text:span text:style-name="T10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1" draw:style-name="gr39" draw:text-style-name="P39" draw:layer="layout" svg:width="1.306cm" svg:height="2.416cm" svg:x="17.034cm" svg:y="5.228cm">
          <text:p text:style-name="P12"><text:span text:style-name="T10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2" draw:style-name="gr40" draw:text-style-name="P39" draw:layer="layout" svg:width="1.306cm" svg:height="2.416cm" svg:x="19.014cm" svg:y="5.228cm">
          <text:p text:style-name="P12"><text:span text:style-name="T10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4" draw:style-name="gr41" draw:text-style-name="P39" draw:layer="layout" svg:width="1.306cm" svg:height="2.416cm" svg:x="21.013cm" svg:y="5.228cm">
          <text:p text:style-name="P12"><text:span text:style-name="T10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5" draw:style-name="gr42" draw:text-style-name="P39" draw:layer="layout" svg:width="1.306cm" svg:height="2.416cm" svg:x="23.011cm" svg:y="5.228cm">
          <text:p text:style-name="P12"><text:span text:style-name="T10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6" draw:style-name="gr43" draw:text-style-name="P39" draw:layer="layout" svg:width="1.306cm" svg:height="2.416cm" svg:x="25.009cm" svg:y="5.228cm">
          <text:p text:style-name="P12"><text:span text:style-name="T10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lujos comerciales" draw:style-name="dp1" draw:master-page-name="Título_20_y_20_objetos" presentation:presentation-page-layout-name="AL2T11">
        <draw:frame draw:name="Título 1" presentation:style-name="pr4" draw:text-style-name="P6" draw:layer="layout" svg:width="27.939cm" svg:height="4.029cm" svg:x="3.048cm" svg:y="0.796cm" presentation:class="title" presentation:user-transformed="true">
          <draw:text-box>
            <text:p text:style-name="P1"><text:span text:style-name="T3">Flujos comerciales</text:span></text:p>
          </draw:text-box>
        </draw:frame>
        <draw:frame draw:name="Marcador de contenido 2" presentation:style-name="pr6" draw:text-style-name="P11" draw:layer="layout" svg:width="7.461cm" svg:height="9.151cm" svg:x="23.526cm" svg:y="7.151cm" presentation:class="outline" presentation:user-transformed="true">
          <draw:text-box>
            <text:list text:style-name="L7">
              <text:list-item>
                <text:p text:style-name="P10"><text:span text:style-name="T6">Flujos comerciales mundiales</text:span></text:p>
              </text:list-item>
            </text:list>
            <text:p text:style-name="P10"><text:span text:style-name="T6"/></text:p>
            <text:list text:continue-numbering="true" text:style-name="L7">
              <text:list-item>
                <text:p text:style-name="P10"><text:span text:style-name="T6">Exportaciones desde Perú</text:span></text:p>
              </text:list-item>
            </text:list>
          </draw:text-box>
        </draw:frame>
        <draw:frame draw:name="Picture 2" draw:style-name="gr2" draw:text-style-name="P7" draw:layer="layout" svg:width="21.046cm" svg:height="11.838cm" svg:x="2.161cm" svg:y="5.127cm">
          <draw:image xlink:href="Pictures/10000001000004B0000002A36F93362F.gif" xlink:type="simple" xlink:show="embed" xlink:actuate="onLoad" draw:mime-type="image/gif">
            <text:p/>
          </draw:image>
          <svg:desc>Flujos de comercio global - Azúcar - Productos y servicios - Sucden</svg:desc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unas fuentes primarias y secundarias" draw:style-name="dp1" draw:master-page-name="Título_20_y_20_objetos" presentation:presentation-page-layout-name="AL2T11">
        <draw:frame draw:name="Título 1" presentation:style-name="pr4" draw:text-style-name="P6" draw:layer="layout" svg:width="27.939cm" svg:height="4.029cm" svg:x="3.048cm" svg:y="0.796cm" presentation:class="title" presentation:user-transformed="true">
          <draw:text-box>
            <text:p text:style-name="P1"><text:span text:style-name="T3">Algunas fuentes primarias y secundarias</text:span></text:p>
          </draw:text-box>
        </draw:frame>
        <draw:g draw:name="Marcador de contenido 3" draw:style-name="gr44">
          <draw:custom-shape draw:style-name="gr45" draw:text-style-name="P7" draw:layer="layout" svg:width="22.303cm" svg:height="19.924cm" svg:x="5.316cm" svg:y="5.1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6" draw:text-style-name="P7" draw:layer="layout" svg:width="4.258cm" svg:height="7.443cm" svg:x="16.685cm" svg:y="8.659cm">
            <text:p/>
            <draw:enhanced-geometry draw:mirror-horizontal="false" draw:mirror-vertical="false" draw:text-areas="0 0 0 0" svg:viewBox="0 0 1533082 2680019" draw:type="ooxml-non-primitive" draw:enhanced-path="M 0 0 L 0 2680019 1533082 2680019 N"/>
          </draw:custom-shape>
          <draw:custom-shape draw:style-name="gr47" draw:text-style-name="P7" draw:layer="layout" svg:width="4.227cm" svg:height="5.34cm" svg:x="16.685cm" svg:y="8.659cm">
            <text:p/>
            <draw:enhanced-geometry draw:mirror-horizontal="false" draw:mirror-vertical="false" draw:text-areas="0 0 0 0" svg:viewBox="0 0 1522181 1922645" draw:type="ooxml-non-primitive" draw:enhanced-path="M 0 0 L 0 1922645 1522181 1922645 N"/>
          </draw:custom-shape>
          <draw:custom-shape draw:style-name="gr48" draw:text-style-name="P7" draw:layer="layout" svg:width="0.908cm" svg:height="5.321cm" svg:x="16.685cm" svg:y="8.659cm">
            <text:p/>
            <draw:enhanced-geometry draw:mirror-horizontal="false" draw:mirror-vertical="false" draw:text-areas="0 0 0 0" svg:viewBox="0 0 327212 1916030" draw:type="ooxml-non-primitive" draw:enhanced-path="M 0 0 L 0 1916030 327212 1916030 N"/>
          </draw:custom-shape>
          <draw:custom-shape draw:style-name="gr49" draw:text-style-name="P7" draw:layer="layout" svg:width="4.185cm" svg:height="3.191cm" svg:x="16.685cm" svg:y="8.659cm">
            <text:p/>
            <draw:enhanced-geometry draw:mirror-horizontal="false" draw:mirror-vertical="false" draw:text-areas="0 0 0 0" svg:viewBox="0 0 1507088 1148977" draw:type="ooxml-non-primitive" draw:enhanced-path="M 0 0 L 0 1148977 1507088 1148977 N"/>
          </draw:custom-shape>
          <draw:custom-shape draw:style-name="gr50" draw:text-style-name="P7" draw:layer="layout" svg:width="0.905cm" svg:height="7.452cm" svg:x="16.685cm" svg:y="8.659cm">
            <text:p/>
            <draw:enhanced-geometry draw:mirror-horizontal="false" draw:mirror-vertical="false" draw:text-areas="0 0 0 0" svg:viewBox="0 0 326266 2683171" draw:type="ooxml-non-primitive" draw:enhanced-path="M 0 0 L 0 2683171 326266 2683171 N"/>
          </draw:custom-shape>
          <draw:custom-shape draw:style-name="gr51" draw:text-style-name="P7" draw:layer="layout" svg:width="0.831cm" svg:height="3.168cm" svg:x="16.685cm" svg:y="8.659cm">
            <text:p/>
            <draw:enhanced-geometry draw:mirror-horizontal="false" draw:mirror-vertical="false" draw:text-areas="0 0 0 0" svg:viewBox="0 0 299658 1140749" draw:type="ooxml-non-primitive" draw:enhanced-path="M 0 0 L 0 1140749 299658 1140749 N"/>
          </draw:custom-shape>
          <draw:custom-shape draw:style-name="gr52" draw:text-style-name="P7" draw:layer="layout" svg:width="0.792cm" svg:height="1.042cm" svg:x="16.685cm" svg:y="8.659cm">
            <text:p/>
            <draw:enhanced-geometry draw:mirror-horizontal="false" draw:mirror-vertical="false" draw:text-areas="0 0 0 0" svg:viewBox="0 0 285418 375423" draw:type="ooxml-non-primitive" draw:enhanced-path="M 0 0 L 0 375423 285418 375423 N"/>
          </draw:custom-shape>
          <draw:custom-shape draw:style-name="gr53" draw:text-style-name="P7" draw:layer="layout" svg:width="4.072cm" svg:height="1.014cm" svg:x="16.685cm" svg:y="8.659cm">
            <text:p/>
            <draw:enhanced-geometry draw:mirror-horizontal="false" draw:mirror-vertical="false" draw:text-areas="0 0 0 0" svg:viewBox="0 0 1466126 365432" draw:type="ooxml-non-primitive" draw:enhanced-path="M 0 0 L 0 365432 1466126 365432 N"/>
          </draw:custom-shape>
          <draw:custom-shape draw:style-name="gr54" draw:text-style-name="P7" draw:layer="layout" svg:width="1.747cm" svg:height="0.606cm" svg:x="16.307cm" svg:y="6.608cm">
            <text:p/>
            <draw:enhanced-geometry draw:mirror-horizontal="false" draw:mirror-vertical="false" draw:text-areas="0 0 0 0" svg:viewBox="0 0 629303 218435" draw:type="ooxml-non-primitive" draw:enhanced-path="M 0 0 L 0 109217 629303 109217 629303 218435 N"/>
          </draw:custom-shape>
          <draw:custom-shape draw:style-name="gr55" draw:text-style-name="P7" draw:layer="layout" svg:width="0.444cm" svg:height="3.443cm" svg:x="12.69cm" svg:y="8.659cm">
            <text:p/>
            <draw:enhanced-geometry draw:mirror-horizontal="false" draw:mirror-vertical="false" draw:text-areas="0 0 0 0" svg:viewBox="0 0 160373 1239846" draw:type="ooxml-non-primitive" draw:enhanced-path="M 160373 0 L 160373 1239846 0 1239846 N"/>
          </draw:custom-shape>
          <draw:custom-shape draw:style-name="gr55" draw:text-style-name="P7" draw:layer="layout" svg:width="0.443cm" svg:height="3.443cm" svg:x="13.136cm" svg:y="8.659cm">
            <text:p/>
            <draw:enhanced-geometry draw:mirror-horizontal="false" draw:mirror-vertical="false" draw:text-areas="0 0 0 0" svg:viewBox="0 0 159759 1239851" draw:type="ooxml-non-primitive" draw:enhanced-path="M 0 0 L 0 1239851 159759 1239851 N"/>
          </draw:custom-shape>
          <draw:custom-shape draw:style-name="gr56" draw:text-style-name="P7" draw:layer="layout" svg:width="0.47cm" svg:height="1.321cm" svg:x="12.665cm" svg:y="8.659cm">
            <text:p/>
            <draw:enhanced-geometry draw:mirror-horizontal="false" draw:mirror-vertical="false" draw:text-areas="0 0 0 0" svg:viewBox="0 0 169381 475909" draw:type="ooxml-non-primitive" draw:enhanced-path="M 169381 0 L 169381 475909 0 475909 N"/>
          </draw:custom-shape>
          <draw:custom-shape draw:style-name="gr57" draw:text-style-name="P7" draw:layer="layout" svg:width="0.432cm" svg:height="1.328cm" svg:x="13.136cm" svg:y="8.659cm">
            <text:p/>
            <draw:enhanced-geometry draw:mirror-horizontal="false" draw:mirror-vertical="false" draw:text-areas="0 0 0 0" svg:viewBox="0 0 156025 478478" draw:type="ooxml-non-primitive" draw:enhanced-path="M 0 0 L 0 478478 156025 478478 N"/>
          </draw:custom-shape>
          <draw:custom-shape draw:style-name="gr58" draw:text-style-name="P7" draw:layer="layout" svg:width="2.015cm" svg:height="0.606cm" svg:x="14.292cm" svg:y="6.608cm">
            <text:p/>
            <draw:enhanced-geometry draw:mirror-horizontal="false" draw:mirror-vertical="false" draw:text-areas="0 0 0 0" svg:viewBox="0 0 725643 218435" draw:type="ooxml-non-primitive" draw:enhanced-path="M 725643 0 L 725643 109217 0 109217 0 218435 N"/>
          </draw:custom-shape>
          <draw:custom-shape draw:style-name="gr59" draw:text-style-name="P41" draw:layer="layout" svg:width="2.888cm" svg:height="1.444cm" svg:x="14.862cm" svg:y="5.163cm">
            <text:p text:style-name="P40"><text:span text:style-name="T20">Fuent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0" draw:text-style-name="P42" draw:layer="layout" svg:width="2.888cm" svg:height="1.444cm" svg:x="12.847cm" svg:y="7.214cm">
            <text:p text:style-name="P40"><text:span text:style-name="T20">Nacional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1" draw:text-style-name="P43" draw:layer="layout" svg:width="2.888cm" svg:height="1.444cm" svg:x="13.569cm" svg:y="9.266cm">
            <text:p text:style-name="P40"><text:span text:style-name="T20">SUNA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2" draw:text-style-name="P43" draw:layer="layout" svg:width="2.888cm" svg:height="1.444cm" svg:x="9.776cm" svg:y="9.259cm">
            <text:p text:style-name="P40"><text:span text:style-name="T20">PROMPER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3" draw:text-style-name="P43" draw:layer="layout" svg:width="2.888cm" svg:height="1.444cm" svg:x="13.58cm" svg:y="11.381cm">
            <text:p text:style-name="P40"><text:span text:style-name="T20">ADEX DATA TRA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4" draw:text-style-name="P43" draw:layer="layout" svg:width="2.888cm" svg:height="1.444cm" svg:x="9.801cm" svg:y="11.381cm">
            <text:p text:style-name="P40"><text:span text:style-name="T20">VERITRA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5" draw:text-style-name="P42" draw:layer="layout" svg:width="3.424cm" svg:height="1.444cm" svg:x="16.343cm" svg:y="7.214cm">
            <text:p text:style-name="P40"><text:span text:style-name="T20">Internacional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6" draw:text-style-name="P43" draw:layer="layout" svg:width="2.888cm" svg:height="1.444cm" svg:x="20.758cm" svg:y="8.952cm">
            <text:p text:style-name="P40"><text:span text:style-name="T20">Global Databas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7" draw:text-style-name="P43" draw:layer="layout" svg:width="2.888cm" svg:height="1.444cm" svg:x="17.478cm" svg:y="8.979cm">
            <text:p text:style-name="P40"><text:span text:style-name="T20">Trade M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8" draw:text-style-name="P43" draw:layer="layout" svg:width="2.888cm" svg:height="1.444cm" svg:x="17.518cm" svg:y="11.105cm">
            <text:p text:style-name="P40"><text:span text:style-name="T20">EMI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9" draw:text-style-name="P43" draw:layer="layout" svg:width="2.888cm" svg:height="1.444cm" svg:x="17.592cm" svg:y="15.39cm">
            <text:p text:style-name="P40"><text:span text:style-name="T20">Market Acces M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0" draw:text-style-name="P43" draw:layer="layout" svg:width="2.888cm" svg:height="1.444cm" svg:x="20.872cm" svg:y="11.128cm">
            <text:p text:style-name="P40"><text:span text:style-name="T20">Statist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1" draw:text-style-name="P43" draw:layer="layout" svg:width="2.888cm" svg:height="1.444cm" svg:x="17.594cm" svg:y="13.259cm">
            <text:p text:style-name="P40"><text:span text:style-name="T20">Minte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2" draw:text-style-name="P43" draw:layer="layout" svg:width="2.888cm" svg:height="1.444cm" svg:x="20.914cm" svg:y="13.277cm">
            <text:p text:style-name="P40"><text:span text:style-name="T20">Panjiv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3" draw:text-style-name="P43" draw:layer="layout" svg:width="2.888cm" svg:height="1.444cm" svg:x="20.944cm" svg:y="15.381cm">
            <text:p text:style-name="P40"><text:span text:style-name="T20">Euromonit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sights, oportunidades y desafíos" draw:style-name="dp1" draw:master-page-name="Título_20_y_20_objetos" presentation:presentation-page-layout-name="AL2T11">
        <draw:frame draw:name="Título 1" presentation:style-name="pr4" draw:text-style-name="P6" draw:layer="layout" svg:width="27.939cm" svg:height="4.029cm" svg:x="3.048cm" svg:y="0.796cm" presentation:class="title" presentation:user-transformed="true">
          <draw:text-box>
            <text:p text:style-name="P1"><text:span text:style-name="T15">Insights, oportunidades y desafíos</text:span></text:p>
          </draw:text-box>
        </draw:frame>
        <draw:frame draw:name="Marcador de contenido 2" presentation:style-name="pr8" draw:text-style-name="P11" draw:layer="layout" svg:width="15.816cm" svg:height="5.427cm" svg:x="5.81cm" svg:y="7.521cm" presentation:class="outline" presentation:user-transformed="true">
          <draw:text-box>
            <text:list text:style-name="L6">
              <text:list-item>
                <text:p text:style-name="P10"><text:span text:style-name="T21">Es eso que todos ven, pero a nadie se le ocurre plantear: ver donde otros no ven para encontrar lo que otros no encuentran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¡Gracias!" draw:style-name="dp1" draw:master-page-name="Título_20_y_20_objetos" presentation:presentation-page-layout-name="AL2T11">
        <draw:frame draw:name="Título 1" presentation:style-name="pr4" draw:text-style-name="P20" draw:layer="layout" svg:width="27.939cm" svg:height="2.014cm" svg:x="3.048cm" svg:y="8.518cm" presentation:class="title" presentation:user-transformed="true">
          <draw:text-box>
            <text:p text:style-name="P19"><text:span text:style-name="T15">¡Gracias!</text:span></text:p>
          </draw:text-box>
        </draw:frame>
        <draw:custom-shape draw:name="Rectángulo 3" draw:style-name="gr8" draw:text-style-name="P13" draw:layer="layout" svg:width="28.309cm" svg:height="0.714cm" svg:x="3.083cm" svg:y="4.488cm">
          <text:p text:style-name="P12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msArrowEnd_20_5" draw:display-name="msArrowEnd 5" svg:viewBox="0 0 300 300" svg:d="M150 0l150 300h-300z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PE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 style:writing-mode="lr-tb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iapositiva_20_de_20_título-outline2" style:display-name="Diapositiva de título-outline2" style:family="presentation" style:parent-style-name="Diapositiva_20_de_20_títul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iapositiva_20_de_20_título-outline3" style:display-name="Diapositiva de título-outline3" style:family="presentation" style:parent-style-name="Diapositiva_20_de_20_títul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iapositiva_20_de_20_título-outline4" style:display-name="Diapositiva de título-outline4" style:family="presentation" style:parent-style-name="Diapositiva_20_de_20_títul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 style:writing-mode="lr-tb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y_20_texto_20_vertical-background" style:display-name="Título y texto vertical-background" style:family="presentation">
      <style:graphic-properties draw:stroke="none" draw:fill="solid" draw:fill-color="#ffffff"/>
      <style:text-properties style:letter-kerning="true"/>
    </style:style>
    <style:style style:name="Título_20_y_20_texto_20_vertical-backgroundobjects" style:display-name="Título y texto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texto_20_vertical-notes" style:display-name="Título y texto 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texto_20_vertical-outline1" style:display-name="Título y texto vertical-outline1" style:family="presentation">
      <style:graphic-properties draw:stroke="none" draw:fill="none" draw:auto-grow-height="false" draw:fit-to-size="false" style:shrink-to-fit="true" style:writing-mode="lr-tb">
        <text:list-style style:name="Título_20_y_20_texto_20_vertical-outline1" style:display-name="Título y texto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y_20_texto_20_vertical-outline2" style:display-name="Título y texto vertical-outline2" style:family="presentation" style:parent-style-name="Título_20_y_20_texto_20_vertica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y_20_texto_20_vertical-outline3" style:display-name="Título y texto vertical-outline3" style:family="presentation" style:parent-style-name="Título_20_y_20_texto_20_vertica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y_20_texto_20_vertical-outline4" style:display-name="Título y texto vertical-outline4" style:family="presentation" style:parent-style-name="Título_20_y_20_texto_20_vertica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y_20_texto_20_vertical-outline5" style:display-name="Título y texto vertical-outline5" style:family="presentation" style:parent-style-name="Título_20_y_20_texto_20_vertical-outline4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6" style:display-name="Título y texto vertical-outline6" style:family="presentation" style:parent-style-name="Título_20_y_20_texto_20_vertical-outline5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7" style:display-name="Título y texto vertical-outline7" style:family="presentation" style:parent-style-name="Título_20_y_20_texto_20_vertical-outline6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8" style:display-name="Título y texto vertical-outline8" style:family="presentation" style:parent-style-name="Título_20_y_20_texto_20_vertical-outline7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9" style:display-name="Título y texto vertical-outline9" style:family="presentation" style:parent-style-name="Título_20_y_20_texto_20_vertical-outline8">
      <style:paragraph-properties fo:margin-top="0.1cm" fo:margin-bottom="0cm"/>
      <style:text-properties fo:font-size="20pt" style:font-size-asian="20pt" style:font-size-complex="20pt"/>
    </style:style>
    <style:style style:name="Título_20_y_20_texto_20_vertical-subtitle" style:display-name="Título y texto vertical-subtitle" style:family="presentation">
      <style:graphic-properties draw:stroke="none" draw:fill="none" draw:textarea-vertical-align="middle">
        <text:list-style style:name="Título_20_y_20_texto_20_vertical-subtitle" style:display-name="Título y texto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texto_20_vertical-title" style:display-name="Título y texto vertical-title" style:family="presentation">
      <style:graphic-properties draw:stroke="none" draw:fill="none" draw:textarea-vertical-align="middle" style:writing-mode="lr-tb">
        <text:list-style style:name="Título_20_y_20_texto_20_vertical-title" style:display-name="Título y texto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vertical_20_y_20_texto-background" style:display-name="Título vertical y texto-background" style:family="presentation">
      <style:graphic-properties draw:stroke="none" draw:fill="solid" draw:fill-color="#ffffff"/>
      <style:text-properties style:letter-kerning="true"/>
    </style:style>
    <style:style style:name="Título_20_vertical_20_y_20_texto-backgroundobjects" style:display-name="Título vertical y 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vertical_20_y_20_texto-notes" style:display-name="Título vertical y 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vertical_20_y_20_texto-outline1" style:display-name="Título vertical y texto-outline1" style:family="presentation">
      <style:graphic-properties draw:stroke="none" draw:fill="none" draw:auto-grow-height="false" draw:fit-to-size="false" style:shrink-to-fit="true" style:writing-mode="lr-tb">
        <text:list-style style:name="Título_20_vertical_20_y_20_texto-outline1" style:display-name="Título vertical y tex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vertical_20_y_20_texto-outline2" style:display-name="Título vertical y texto-outline2" style:family="presentation" style:parent-style-name="Título_20_vertical_20_y_20_text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vertical_20_y_20_texto-outline3" style:display-name="Título vertical y texto-outline3" style:family="presentation" style:parent-style-name="Título_20_vertical_20_y_20_text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vertical_20_y_20_texto-outline4" style:display-name="Título vertical y texto-outline4" style:family="presentation" style:parent-style-name="Título_20_vertical_20_y_20_text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vertical_20_y_20_texto-outline5" style:display-name="Título vertical y texto-outline5" style:family="presentation" style:parent-style-name="Título_20_vertical_20_y_20_texto-outline4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6" style:display-name="Título vertical y texto-outline6" style:family="presentation" style:parent-style-name="Título_20_vertical_20_y_20_texto-outline5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7" style:display-name="Título vertical y texto-outline7" style:family="presentation" style:parent-style-name="Título_20_vertical_20_y_20_texto-outline6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8" style:display-name="Título vertical y texto-outline8" style:family="presentation" style:parent-style-name="Título_20_vertical_20_y_20_texto-outline7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9" style:display-name="Título vertical y texto-outline9" style:family="presentation" style:parent-style-name="Título_20_vertical_20_y_20_texto-outline8">
      <style:paragraph-properties fo:margin-top="0.1cm" fo:margin-bottom="0cm"/>
      <style:text-properties fo:font-size="20pt" style:font-size-asian="20pt" style:font-size-complex="20pt"/>
    </style:style>
    <style:style style:name="Título_20_vertical_20_y_20_texto-subtitle" style:display-name="Título vertical y texto-subtitle" style:family="presentation">
      <style:graphic-properties draw:stroke="none" draw:fill="none" draw:textarea-vertical-align="middle">
        <text:list-style style:name="Título_20_vertical_20_y_20_texto-subtitle" style:display-name="Título vertical y tex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vertical_20_y_20_texto-title" style:display-name="Título vertical y texto-title" style:family="presentation">
      <style:graphic-properties draw:stroke="none" draw:fill="none" draw:textarea-vertical-align="middle" style:writing-mode="lr-tb">
        <text:list-style style:name="Título_20_vertical_20_y_20_texto-title" style:display-name="Título vertical y tex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false" style:shrink-to-fit="true" style:writing-mode="lr-tb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y_20_objetos-outline2" style:display-name="Título y objetos-outline2" style:family="presentation" style:parent-style-name="Título_20_y_20_objeto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y_20_objetos-outline3" style:display-name="Título y objetos-outline3" style:family="presentation" style:parent-style-name="Título_20_y_20_objeto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y_20_objetos-outline4" style:display-name="Título y objetos-outline4" style:family="presentation" style:parent-style-name="Título_20_y_20_objeto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 style:writing-mode="lr-tb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ncabezado_20_de_20_sección-background" style:display-name="Encabezado de sección-background" style:family="presentation">
      <style:graphic-properties draw:stroke="none" draw:fill="solid" draw:fill-color="#ffffff"/>
      <style:text-properties style:letter-kerning="true"/>
    </style:style>
    <style:style style:name="Encabezado_20_de_20_sección-backgroundobjects" style:display-name="Encabezado de 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cabezado_20_de_20_sección-notes" style:display-name="Encabezado de 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cabezado_20_de_20_sección-outline1" style:display-name="Encabezado de sección-outline1" style:family="presentation">
      <style:graphic-properties draw:stroke="none" draw:fill="none" draw:auto-grow-height="false" draw:fit-to-size="false" style:shrink-to-fit="true" style:writing-mode="lr-tb">
        <text:list-style style:name="Encabezado_20_de_20_sección-outline1" style:display-name="Encabezado de secció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ncabezado_20_de_20_sección-outline2" style:display-name="Encabezado de sección-outline2" style:family="presentation" style:parent-style-name="Encabezado_20_de_20_secció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ncabezado_20_de_20_sección-outline3" style:display-name="Encabezado de sección-outline3" style:family="presentation" style:parent-style-name="Encabezado_20_de_20_secció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ncabezado_20_de_20_sección-outline4" style:display-name="Encabezado de sección-outline4" style:family="presentation" style:parent-style-name="Encabezado_20_de_20_secció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ncabezado_20_de_20_sección-outline5" style:display-name="Encabezado de sección-outline5" style:family="presentation" style:parent-style-name="Encabezado_20_de_20_sección-outline4">
      <style:paragraph-properties fo:margin-top="0.1cm" fo:margin-bottom="0cm"/>
      <style:text-properties fo:font-size="20pt" style:font-size-asian="20pt" style:font-size-complex="20pt"/>
    </style:style>
    <style:style style:name="Encabezado_20_de_20_sección-outline6" style:display-name="Encabezado de sección-outline6" style:family="presentation" style:parent-style-name="Encabezado_20_de_20_sección-outline5">
      <style:paragraph-properties fo:margin-top="0.1cm" fo:margin-bottom="0cm"/>
      <style:text-properties fo:font-size="20pt" style:font-size-asian="20pt" style:font-size-complex="20pt"/>
    </style:style>
    <style:style style:name="Encabezado_20_de_20_sección-outline7" style:display-name="Encabezado de sección-outline7" style:family="presentation" style:parent-style-name="Encabezado_20_de_20_sección-outline6">
      <style:paragraph-properties fo:margin-top="0.1cm" fo:margin-bottom="0cm"/>
      <style:text-properties fo:font-size="20pt" style:font-size-asian="20pt" style:font-size-complex="20pt"/>
    </style:style>
    <style:style style:name="Encabezado_20_de_20_sección-outline8" style:display-name="Encabezado de sección-outline8" style:family="presentation" style:parent-style-name="Encabezado_20_de_20_sección-outline7">
      <style:paragraph-properties fo:margin-top="0.1cm" fo:margin-bottom="0cm"/>
      <style:text-properties fo:font-size="20pt" style:font-size-asian="20pt" style:font-size-complex="20pt"/>
    </style:style>
    <style:style style:name="Encabezado_20_de_20_sección-outline9" style:display-name="Encabezado de sección-outline9" style:family="presentation" style:parent-style-name="Encabezado_20_de_20_sección-outline8">
      <style:paragraph-properties fo:margin-top="0.1cm" fo:margin-bottom="0cm"/>
      <style:text-properties fo:font-size="20pt" style:font-size-asian="20pt" style:font-size-complex="20pt"/>
    </style:style>
    <style:style style:name="Encabezado_20_de_20_sección-subtitle" style:display-name="Encabezado de sección-subtitle" style:family="presentation">
      <style:graphic-properties draw:stroke="none" draw:fill="none" draw:textarea-vertical-align="middle">
        <text:list-style style:name="Encabezado_20_de_20_sección-subtitle" style:display-name="Encabezado de secció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cabezado_20_de_20_sección-title" style:display-name="Encabezado de sección-title" style:family="presentation">
      <style:graphic-properties draw:stroke="none" draw:fill="none" draw:textarea-vertical-align="middle" style:writing-mode="lr-tb">
        <text:list-style style:name="Encabezado_20_de_20_sección-title" style:display-name="Encabezado de secció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os_20_objetos-background" style:display-name="Dos objetos-background" style:family="presentation">
      <style:graphic-properties draw:stroke="none" draw:fill="solid" draw:fill-color="#ffffff"/>
      <style:text-properties style:letter-kerning="true"/>
    </style:style>
    <style:style style:name="Dos_20_objetos-backgroundobjects" style:display-name="Dos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s_20_objetos-notes" style:display-name="Dos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s_20_objetos-outline1" style:display-name="Dos objetos-outline1" style:family="presentation">
      <style:graphic-properties draw:stroke="none" draw:fill="none" draw:auto-grow-height="false" draw:fit-to-size="false" style:shrink-to-fit="true" style:writing-mode="lr-tb">
        <text:list-style style:name="Dos_20_objetos-outline1" style:display-name="Dos 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os_20_objetos-outline2" style:display-name="Dos objetos-outline2" style:family="presentation" style:parent-style-name="Dos_20_objeto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os_20_objetos-outline3" style:display-name="Dos objetos-outline3" style:family="presentation" style:parent-style-name="Dos_20_objeto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os_20_objetos-outline4" style:display-name="Dos objetos-outline4" style:family="presentation" style:parent-style-name="Dos_20_objeto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os_20_objetos-outline5" style:display-name="Dos objetos-outline5" style:family="presentation" style:parent-style-name="Dos_20_objetos-outline4">
      <style:paragraph-properties fo:margin-top="0.1cm" fo:margin-bottom="0cm"/>
      <style:text-properties fo:font-size="20pt" style:font-size-asian="20pt" style:font-size-complex="20pt"/>
    </style:style>
    <style:style style:name="Dos_20_objetos-outline6" style:display-name="Dos objetos-outline6" style:family="presentation" style:parent-style-name="Dos_20_objetos-outline5">
      <style:paragraph-properties fo:margin-top="0.1cm" fo:margin-bottom="0cm"/>
      <style:text-properties fo:font-size="20pt" style:font-size-asian="20pt" style:font-size-complex="20pt"/>
    </style:style>
    <style:style style:name="Dos_20_objetos-outline7" style:display-name="Dos objetos-outline7" style:family="presentation" style:parent-style-name="Dos_20_objetos-outline6">
      <style:paragraph-properties fo:margin-top="0.1cm" fo:margin-bottom="0cm"/>
      <style:text-properties fo:font-size="20pt" style:font-size-asian="20pt" style:font-size-complex="20pt"/>
    </style:style>
    <style:style style:name="Dos_20_objetos-outline8" style:display-name="Dos objetos-outline8" style:family="presentation" style:parent-style-name="Dos_20_objetos-outline7">
      <style:paragraph-properties fo:margin-top="0.1cm" fo:margin-bottom="0cm"/>
      <style:text-properties fo:font-size="20pt" style:font-size-asian="20pt" style:font-size-complex="20pt"/>
    </style:style>
    <style:style style:name="Dos_20_objetos-outline9" style:display-name="Dos objetos-outline9" style:family="presentation" style:parent-style-name="Dos_20_objetos-outline8">
      <style:paragraph-properties fo:margin-top="0.1cm" fo:margin-bottom="0cm"/>
      <style:text-properties fo:font-size="20pt" style:font-size-asian="20pt" style:font-size-complex="20pt"/>
    </style:style>
    <style:style style:name="Dos_20_objetos-subtitle" style:display-name="Dos objetos-subtitle" style:family="presentation">
      <style:graphic-properties draw:stroke="none" draw:fill="none" draw:textarea-vertical-align="middle">
        <text:list-style style:name="Dos_20_objetos-subtitle" style:display-name="Dos 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objetos-title" style:display-name="Dos objetos-title" style:family="presentation">
      <style:graphic-properties draw:stroke="none" draw:fill="none" draw:textarea-vertical-align="middle" style:writing-mode="lr-tb">
        <text:list-style style:name="Dos_20_objetos-title" style:display-name="Dos 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ción-background" style:family="presentation">
      <style:graphic-properties draw:stroke="none" draw:fill="solid" draw:fill-color="#ffffff"/>
      <style:text-properties style:letter-kerning="true"/>
    </style:style>
    <style:style style:name="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ción-outline1" style:family="presentation">
      <style:graphic-properties draw:stroke="none" draw:fill="none" draw:auto-grow-height="false" draw:fit-to-size="false" style:shrink-to-fit="true" style:writing-mode="lr-tb">
        <text:list-style style:name="Comparació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ación-outline2" style:family="presentation" style:parent-style-name="Comparació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ación-outline3" style:family="presentation" style:parent-style-name="Comparació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ación-outline4" style:family="presentation" style:parent-style-name="Comparació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ación-outline5" style:family="presentation" style:parent-style-name="Comparación-outline4">
      <style:paragraph-properties fo:margin-top="0.1cm" fo:margin-bottom="0cm"/>
      <style:text-properties fo:font-size="20pt" style:font-size-asian="20pt" style:font-size-complex="20pt"/>
    </style:style>
    <style:style style:name="Comparación-outline6" style:family="presentation" style:parent-style-name="Comparación-outline5">
      <style:paragraph-properties fo:margin-top="0.1cm" fo:margin-bottom="0cm"/>
      <style:text-properties fo:font-size="20pt" style:font-size-asian="20pt" style:font-size-complex="20pt"/>
    </style:style>
    <style:style style:name="Comparación-outline7" style:family="presentation" style:parent-style-name="Comparación-outline6">
      <style:paragraph-properties fo:margin-top="0.1cm" fo:margin-bottom="0cm"/>
      <style:text-properties fo:font-size="20pt" style:font-size-asian="20pt" style:font-size-complex="20pt"/>
    </style:style>
    <style:style style:name="Comparación-outline8" style:family="presentation" style:parent-style-name="Comparación-outline7">
      <style:paragraph-properties fo:margin-top="0.1cm" fo:margin-bottom="0cm"/>
      <style:text-properties fo:font-size="20pt" style:font-size-asian="20pt" style:font-size-complex="20pt"/>
    </style:style>
    <style:style style:name="Comparación-outline9" style:family="presentation" style:parent-style-name="Comparación-outline8">
      <style:paragraph-properties fo:margin-top="0.1cm" fo:margin-bottom="0cm"/>
      <style:text-properties fo:font-size="20pt" style:font-size-asian="20pt" style:font-size-complex="20pt"/>
    </style:style>
    <style:style style:name="Comparación-subtitle" style:family="presentation">
      <style:graphic-properties draw:stroke="none" draw:fill="none" draw:textarea-vertical-align="middle">
        <text:list-style style:name="Comparació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ción-title" style:family="presentation">
      <style:graphic-properties draw:stroke="none" draw:fill="none" draw:textarea-vertical-align="middle" style:writing-mode="lr-tb">
        <text:list-style style:name="Comparació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olo_20_el_20_título-background" style:display-name="Solo el título-background" style:family="presentation">
      <style:graphic-properties draw:stroke="none" draw:fill="solid" draw:fill-color="#ffffff"/>
      <style:text-properties style:letter-kerning="true"/>
    </style:style>
    <style:style style:name="Solo_20_el_20_título-backgroundobjects" style:display-name="So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lo_20_el_20_título-notes" style:display-name="Solo el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lo_20_el_20_título-outline1" style:display-name="Solo el título-outline1" style:family="presentation">
      <style:graphic-properties draw:stroke="none" draw:fill="none" draw:auto-grow-height="false" draw:fit-to-size="false" style:shrink-to-fit="true" style:writing-mode="lr-tb">
        <text:list-style style:name="Solo_20_el_20_título-outline1" style:display-name="Solo el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olo_20_el_20_título-outline2" style:display-name="Solo el título-outline2" style:family="presentation" style:parent-style-name="Solo_20_el_20_títul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olo_20_el_20_título-outline3" style:display-name="Solo el título-outline3" style:family="presentation" style:parent-style-name="Solo_20_el_20_títul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olo_20_el_20_título-outline4" style:display-name="Solo el título-outline4" style:family="presentation" style:parent-style-name="Solo_20_el_20_títul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olo_20_el_20_título-outline5" style:display-name="Solo el título-outline5" style:family="presentation" style:parent-style-name="Solo_20_el_20_título-outline4">
      <style:paragraph-properties fo:margin-top="0.1cm" fo:margin-bottom="0cm"/>
      <style:text-properties fo:font-size="20pt" style:font-size-asian="20pt" style:font-size-complex="20pt"/>
    </style:style>
    <style:style style:name="Solo_20_el_20_título-outline6" style:display-name="Solo el título-outline6" style:family="presentation" style:parent-style-name="Solo_20_el_20_título-outline5">
      <style:paragraph-properties fo:margin-top="0.1cm" fo:margin-bottom="0cm"/>
      <style:text-properties fo:font-size="20pt" style:font-size-asian="20pt" style:font-size-complex="20pt"/>
    </style:style>
    <style:style style:name="Solo_20_el_20_título-outline7" style:display-name="Solo el título-outline7" style:family="presentation" style:parent-style-name="Solo_20_el_20_título-outline6">
      <style:paragraph-properties fo:margin-top="0.1cm" fo:margin-bottom="0cm"/>
      <style:text-properties fo:font-size="20pt" style:font-size-asian="20pt" style:font-size-complex="20pt"/>
    </style:style>
    <style:style style:name="Solo_20_el_20_título-outline8" style:display-name="Solo el título-outline8" style:family="presentation" style:parent-style-name="Solo_20_el_20_título-outline7">
      <style:paragraph-properties fo:margin-top="0.1cm" fo:margin-bottom="0cm"/>
      <style:text-properties fo:font-size="20pt" style:font-size-asian="20pt" style:font-size-complex="20pt"/>
    </style:style>
    <style:style style:name="Solo_20_el_20_título-outline9" style:display-name="Solo el título-outline9" style:family="presentation" style:parent-style-name="Solo_20_el_20_título-outline8">
      <style:paragraph-properties fo:margin-top="0.1cm" fo:margin-bottom="0cm"/>
      <style:text-properties fo:font-size="20pt" style:font-size-asian="20pt" style:font-size-complex="20pt"/>
    </style:style>
    <style:style style:name="Solo_20_el_20_título-subtitle" style:display-name="Solo el título-subtitle" style:family="presentation">
      <style:graphic-properties draw:stroke="none" draw:fill="none" draw:textarea-vertical-align="middle">
        <text:list-style style:name="Solo_20_el_20_título-subtitle" style:display-name="Solo el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_20_el_20_título-title" style:display-name="Solo el título-title" style:family="presentation">
      <style:graphic-properties draw:stroke="none" draw:fill="none" draw:textarea-vertical-align="middle" style:writing-mode="lr-tb">
        <text:list-style style:name="Solo_20_el_20_título-title" style:display-name="Solo el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false" style:shrink-to-fit="true" style:writing-mode="lr-tb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n_20_blanco-outline2" style:display-name="En blanco-outline2" style:family="presentation" style:parent-style-name="En_20_blanc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n_20_blanco-outline3" style:display-name="En blanco-outline3" style:family="presentation" style:parent-style-name="En_20_blanc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n_20_blanco-outline4" style:display-name="En blanco-outline4" style:family="presentation" style:parent-style-name="En_20_blanc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 style:writing-mode="lr-tb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ido_20_con_20_título-background" style:display-name="Contenido con título-background" style:family="presentation">
      <style:graphic-properties draw:stroke="none" draw:fill="solid" draw:fill-color="#ffffff"/>
      <style:text-properties style:letter-kerning="true"/>
    </style:style>
    <style:style style:name="Contenido_20_con_20_título-backgroundobjects" style:display-name="Contenido con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ido_20_con_20_título-notes" style:display-name="Contenido con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ido_20_con_20_título-outline1" style:display-name="Contenido con título-outline1" style:family="presentation">
      <style:graphic-properties draw:stroke="none" draw:fill="none" draw:auto-grow-height="false" draw:fit-to-size="false" style:shrink-to-fit="true" style:writing-mode="lr-tb">
        <text:list-style style:name="Contenido_20_con_20_título-outline1" style:display-name="Contenido con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ntenido_20_con_20_título-outline2" style:display-name="Contenido con título-outline2" style:family="presentation" style:parent-style-name="Contenido_20_con_20_títul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ntenido_20_con_20_título-outline3" style:display-name="Contenido con título-outline3" style:family="presentation" style:parent-style-name="Contenido_20_con_20_títul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ntenido_20_con_20_título-outline4" style:display-name="Contenido con título-outline4" style:family="presentation" style:parent-style-name="Contenido_20_con_20_títul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ntenido_20_con_20_título-outline5" style:display-name="Contenido con título-outline5" style:family="presentation" style:parent-style-name="Contenido_20_con_20_título-outline4">
      <style:paragraph-properties fo:margin-top="0.1cm" fo:margin-bottom="0cm"/>
      <style:text-properties fo:font-size="20pt" style:font-size-asian="20pt" style:font-size-complex="20pt"/>
    </style:style>
    <style:style style:name="Contenido_20_con_20_título-outline6" style:display-name="Contenido con título-outline6" style:family="presentation" style:parent-style-name="Contenido_20_con_20_título-outline5">
      <style:paragraph-properties fo:margin-top="0.1cm" fo:margin-bottom="0cm"/>
      <style:text-properties fo:font-size="20pt" style:font-size-asian="20pt" style:font-size-complex="20pt"/>
    </style:style>
    <style:style style:name="Contenido_20_con_20_título-outline7" style:display-name="Contenido con título-outline7" style:family="presentation" style:parent-style-name="Contenido_20_con_20_título-outline6">
      <style:paragraph-properties fo:margin-top="0.1cm" fo:margin-bottom="0cm"/>
      <style:text-properties fo:font-size="20pt" style:font-size-asian="20pt" style:font-size-complex="20pt"/>
    </style:style>
    <style:style style:name="Contenido_20_con_20_título-outline8" style:display-name="Contenido con título-outline8" style:family="presentation" style:parent-style-name="Contenido_20_con_20_título-outline7">
      <style:paragraph-properties fo:margin-top="0.1cm" fo:margin-bottom="0cm"/>
      <style:text-properties fo:font-size="20pt" style:font-size-asian="20pt" style:font-size-complex="20pt"/>
    </style:style>
    <style:style style:name="Contenido_20_con_20_título-outline9" style:display-name="Contenido con título-outline9" style:family="presentation" style:parent-style-name="Contenido_20_con_20_título-outline8">
      <style:paragraph-properties fo:margin-top="0.1cm" fo:margin-bottom="0cm"/>
      <style:text-properties fo:font-size="20pt" style:font-size-asian="20pt" style:font-size-complex="20pt"/>
    </style:style>
    <style:style style:name="Contenido_20_con_20_título-subtitle" style:display-name="Contenido con título-subtitle" style:family="presentation">
      <style:graphic-properties draw:stroke="none" draw:fill="none" draw:textarea-vertical-align="middle">
        <text:list-style style:name="Contenido_20_con_20_título-subtitle" style:display-name="Contenido con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_20_con_20_título-title" style:display-name="Contenido con título-title" style:family="presentation">
      <style:graphic-properties draw:stroke="none" draw:fill="none" draw:textarea-vertical-align="middle" style:writing-mode="lr-tb">
        <text:list-style style:name="Contenido_20_con_20_título-title" style:display-name="Contenido con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gen_20_con_20_título-background" style:display-name="Imagen con título-background" style:family="presentation">
      <style:graphic-properties draw:stroke="none" draw:fill="solid" draw:fill-color="#ffffff"/>
      <style:text-properties style:letter-kerning="true"/>
    </style:style>
    <style:style style:name="Imagen_20_con_20_título-backgroundobjects" style:display-name="Imagen con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n_20_con_20_título-notes" style:display-name="Imagen con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n_20_con_20_título-outline1" style:display-name="Imagen con título-outline1" style:family="presentation">
      <style:graphic-properties draw:stroke="none" draw:fill="none" draw:auto-grow-height="false" draw:fit-to-size="false" style:shrink-to-fit="true" style:writing-mode="lr-tb">
        <text:list-style style:name="Imagen_20_con_20_título-outline1" style:display-name="Imagen con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Imagen_20_con_20_título-outline2" style:display-name="Imagen con título-outline2" style:family="presentation" style:parent-style-name="Imagen_20_con_20_títul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Imagen_20_con_20_título-outline3" style:display-name="Imagen con título-outline3" style:family="presentation" style:parent-style-name="Imagen_20_con_20_títul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Imagen_20_con_20_título-outline4" style:display-name="Imagen con título-outline4" style:family="presentation" style:parent-style-name="Imagen_20_con_20_títul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Imagen_20_con_20_título-outline5" style:display-name="Imagen con título-outline5" style:family="presentation" style:parent-style-name="Imagen_20_con_20_título-outline4">
      <style:paragraph-properties fo:margin-top="0.1cm" fo:margin-bottom="0cm"/>
      <style:text-properties fo:font-size="20pt" style:font-size-asian="20pt" style:font-size-complex="20pt"/>
    </style:style>
    <style:style style:name="Imagen_20_con_20_título-outline6" style:display-name="Imagen con título-outline6" style:family="presentation" style:parent-style-name="Imagen_20_con_20_título-outline5">
      <style:paragraph-properties fo:margin-top="0.1cm" fo:margin-bottom="0cm"/>
      <style:text-properties fo:font-size="20pt" style:font-size-asian="20pt" style:font-size-complex="20pt"/>
    </style:style>
    <style:style style:name="Imagen_20_con_20_título-outline7" style:display-name="Imagen con título-outline7" style:family="presentation" style:parent-style-name="Imagen_20_con_20_título-outline6">
      <style:paragraph-properties fo:margin-top="0.1cm" fo:margin-bottom="0cm"/>
      <style:text-properties fo:font-size="20pt" style:font-size-asian="20pt" style:font-size-complex="20pt"/>
    </style:style>
    <style:style style:name="Imagen_20_con_20_título-outline8" style:display-name="Imagen con título-outline8" style:family="presentation" style:parent-style-name="Imagen_20_con_20_título-outline7">
      <style:paragraph-properties fo:margin-top="0.1cm" fo:margin-bottom="0cm"/>
      <style:text-properties fo:font-size="20pt" style:font-size-asian="20pt" style:font-size-complex="20pt"/>
    </style:style>
    <style:style style:name="Imagen_20_con_20_título-outline9" style:display-name="Imagen con título-outline9" style:family="presentation" style:parent-style-name="Imagen_20_con_20_título-outline8">
      <style:paragraph-properties fo:margin-top="0.1cm" fo:margin-bottom="0cm"/>
      <style:text-properties fo:font-size="20pt" style:font-size-asian="20pt" style:font-size-complex="20pt"/>
    </style:style>
    <style:style style:name="Imagen_20_con_20_título-subtitle" style:display-name="Imagen con título-subtitle" style:family="presentation">
      <style:graphic-properties draw:stroke="none" draw:fill="none" draw:textarea-vertical-align="middle">
        <text:list-style style:name="Imagen_20_con_20_título-subtitle" style:display-name="Imagen con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n_20_con_20_título-title" style:display-name="Imagen con título-title" style:family="presentation">
      <style:graphic-properties draw:stroke="none" draw:fill="none" draw:textarea-vertical-align="middle" style:writing-mode="lr-tb">
        <text:list-style style:name="Imagen_20_con_20_título-title" style:display-name="Imagen con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44cm" svg:stroke-linecap="butt" draw:fill="solid" draw:fill-color="#9b2d1f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Mgr4" style:family="graphic" style:parent-style-name="standard">
      <style:graphic-properties draw:stroke="none" svg:stroke-width="0.044cm" svg:stroke-linecap="butt" draw:fill="solid" draw:fill-color="#d34817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5" style:family="graphic" style:parent-style-name="standard">
      <style:graphic-properties draw:stroke="solid" svg:stroke-width="0.018cm" svg:stroke-color="#808080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>
          <loext:transformation loext:type="lummod" loext:value="5000"/>
          <loext:transformation loext:type="lumoff" loext:value="5000"/>
        </loext:stroke-complex-color>
      </style:graphic-properties>
    </style:style>
    <style:style style:name="Mpr1" style:family="presentation" style:parent-style-name="Diapositiva_20_d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Diapositiva_20_de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ítulo_20_y_20_texto_20_vertical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ítulo_20_y_20_texto_20_vertical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tb-rl"/>
    </style:style>
    <style:style style:name="Mpr7" style:family="presentation" style:parent-style-name="Título_20_y_20_texto_20_vertic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ítulo_20_y_20_texto_20_vertic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ítulo_20_y_20_texto_20_vertic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ítulo_20_vertical_20_y_20_texto-title">
      <style:graphic-properties draw:stroke="none" svg:stroke-width="0cm" draw:fill="none" loext:fill-use-slide-background="false" draw:textarea-horizontal-align="left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Título_20_vertical_20_y_20_texto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tb-rl"/>
    </style:style>
    <style:style style:name="Mpr12" style:family="presentation" style:parent-style-name="Título_20_vertical_20_y_20_text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ítulo_20_vertical_20_y_20_tex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Título_20_vertical_20_y_20_tex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ítulo_20_y_20_objetos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ítulo_20_y_20_objet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7" style:family="presentation" style:parent-style-name="Título_20_y_20_objeto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ítulo_20_y_20_objeto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Encabezado_20_de_20_secció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Encabezado_20_de_20_secció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Encabezado_20_de_20_secció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Encabezado_20_de_20_secció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Encabezado_20_de_20_secció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Dos_20_objetos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Dos_20_objet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27" style:family="presentation" style:parent-style-name="Dos_20_objeto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Dos_20_objeto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Dos_20_objeto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ació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ación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ació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33" style:family="presentation" style:parent-style-name="Comparació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ació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ació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Solo_20_el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Solo_20_el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Solo_20_el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Solo_20_el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En_20_blanc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En_20_blanc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En_20_blanc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ido_20_con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ido_20_con_20_títul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45" style:family="presentation" style:parent-style-name="Contenido_20_con_20_títul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ido_20_con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nido_20_con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Contenido_20_con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Imagen_20_con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.254cm" fo:padding-right="0.254cm" fo:wrap-option="wrap" loext:decorative="false"/>
      <style:paragraph-properties style:writing-mode="lr-tb"/>
    </style:style>
    <style:style style:name="Mpr50" style:family="presentation" style:parent-style-name="Imagen_20_con_20_título-outline1">
      <style:graphic-properties draw:stroke="none" svg:stroke-width="0cm" draw:fill="solid" draw:fill-color="#d8d0c0" draw:textarea-horizontal-align="justify" draw:textarea-vertical-align="top" draw:auto-grow-height="false" draw:fit-to-size="false" style:shrink-to-fit="false" fo:min-height="11.049cm" fo:padding-top="1.27cm" fo:padding-bottom="0.125cm" fo:padding-left="1.27cm" fo:padding-right="0.25cm" fo:wrap-option="wrap" loext:decorative="false">
        <loext:fill-complex-color loext:theme-type="light2" loext:color-type="theme">
          <loext:transformation loext:type="lummod" loext:value="9000"/>
        </loext:fill-complex-color>
      </style:graphic-properties>
      <style:paragraph-properties style:writing-mode="lr-tb"/>
    </style:style>
    <style:style style:name="Mpr51" style:family="presentation" style:parent-style-name="Imagen_20_con_20_títul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.254cm" fo:padding-right="0.254cm" fo:wrap-option="wrap" loext:decorative="false"/>
      <style:paragraph-properties style:writing-mode="lr-tb"/>
    </style:style>
    <style:style style:name="Mpr52" style:family="presentation" style:parent-style-name="Imagen_20_con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Imagen_20_con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Imagen_20_con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b2d1f"/>
      <style:paragraph-properties fo:text-align="start"/>
      <style:text-properties fo:font-size="18pt"/>
    </style:style>
    <style:style style:name="MP6" style:family="paragraph">
      <loext:graphic-properties draw:fill="solid" draw:fill-color="#d34817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85%" fo:text-align="start" fo:text-indent="0cm" style:punctuation-wrap="hanging" loext:tab-stop-distance="2.54cm" style:writing-mode="lr-tb">
        <style:tab-stops/>
      </style:paragraph-properties>
      <style:text-properties fo:font-size="80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85%" fo:text-align="start" fo:text-indent="0cm" style:punctuation-wrap="hanging" loext:tab-stop-distance="2.54cm" style:writing-mode="lr-tb">
        <style:tab-stops/>
      </style:paragraph-properties>
      <style:text-properties fo:font-size="48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7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/>
      </style:paragraph-properties>
      <style:text-properties fo:font-size="20pt" fo:hyphenate="false"/>
    </style:style>
    <style:style style:name="MP18" style:family="paragraph">
      <style:paragraph-properties fo:margin-left="0cm" fo:margin-right="0cm" fo:margin-top="0.071cm" fo:margin-bottom="0.141cm" fo:line-height="90%" fo:text-align="start" fo:text-indent="0cm" style:punctuation-wrap="hanging" loext:tab-stop-distance="2.54cm" style:writing-mode="lr-tb">
        <style:tab-stops/>
      </style:paragraph-properties>
      <style:text-properties fo:font-size="2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2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23" style:family="paragraph">
      <style:paragraph-properties fo:margin-left="0cm" fo:margin-right="0cm" fo:margin-top="0cm" fo:margin-bottom="0cm" fo:line-height="85%" fo:text-align="start" fo:text-indent="0cm" style:punctuation-wrap="hanging" loext:tab-stop-distance="2.54cm" style:writing-mode="lr-tb">
        <style:tab-stops/>
      </style:paragraph-properties>
      <style:text-properties fo:font-size="36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5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28" style:family="paragraph">
      <loext:graphic-properties draw:fill="solid" draw:fill-color="#d8d0c0"/>
      <style:paragraph-properties fo:text-align="start" style:font-independent-line-spacing="true"/>
      <style:text-properties fo:font-size="32pt"/>
    </style:style>
    <style:style style:name="MP29" style:family="paragraph">
      <style:paragraph-properties fo:margin-left="0cm" fo:margin-right="0cm" fo:margin-top="0cm" fo:margin-bottom="0.212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T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 Light" fo:font-size="80pt" fo:letter-spacing="-0.018cm" fo:language="es" fo:country="ES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9pt" fo:letter-spacing="normal" fo:language="es" fo:country="P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.5pt" fo:letter-spacing="normal" fo:language="es" fo:country="PE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 Light" fo:font-size="48pt" fo:letter-spacing="-0.018cm" fo:language="es" fo:country="E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5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6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7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14pt" fo:letter-spacing="normal" fo:language="es" fo:country="E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8" style:family="text">
      <style:text-properties fo:text-transform="uppercase" fo:color="#696464" loext:opacity="100%" style:text-outline="false" style:text-line-through-style="none" style:text-line-through-type="none" style:text-position="0% 100%" style:font-name="Calibri Light" fo:font-size="24pt" fo:letter-spacing="0.071cm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2" loext:color-type="theme"/>
      </style:text-properties>
    </style:style>
    <style:style style:name="MT9" style:family="text">
      <style:text-properties fo:text-transform="uppercase" fo:color="#696464" loext:opacity="100%" style:text-outline="false" style:text-line-through-style="none" style:text-line-through-type="none" style:text-position="0% 100%" style:font-name="Calibri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2" loext:color-type="theme"/>
      </style:text-properties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" fo:font-size="36pt" fo:letter-spacing="-0.018cm" fo:language="es" fo:country="E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5pt" fo:letter-spacing="normal" fo:language="es" fo:country="E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MT12" style:family="text">
      <style:text-properties fo:font-variant="normal" fo:text-transform="none" fo:color="#696464" loext:opacity="100%" style:text-outline="false" style:text-line-through-style="none" style:text-line-through-type="none" style:text-position="0% 100%" style:font-name="Calibri" fo:font-size="10.5pt" fo:letter-spacing="normal" fo:language="es" fo:country="PE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2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s" fo:country="E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 ">
        <style:list-level-properties text:min-label-width="0.254cm"/>
        <style:text-properties fo:font-family="Calibri" style:font-family-generic="swiss" style:font-pitch="variable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 ">
        <style:list-level-properties text:min-label-width="0.254cm"/>
        <style:text-properties fo:font-family="Calibri" style:font-family-generic="swiss" style:font-pitch="variable" fo:color="#d34817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d34817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 ">
        <style:list-level-properties text:min-label-width="0.254cm"/>
        <style:text-properties fo:font-family="Calibri" style:font-family-generic="swiss" style:font-pitch="variable" fo:color="#d34817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d34817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d34817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 ">
        <style:list-level-properties text:min-label-width="0.254cm"/>
        <style:text-properties fo:font-family="Calibri" style:font-family-generic="swiss" style:font-pitch="variable" fo:color="#d34817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d34817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d34817" fo:font-size="100%"/>
      </text:list-level-style-bullet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d34817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 ">
        <style:list-level-properties text:min-label-width="0.254cm"/>
        <style:text-properties fo:font-family="Calibri" style:font-family-generic="swiss" style:font-pitch="variable" fo:color="#d34817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d34817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d34817" fo:font-size="100%"/>
      </text:list-level-style-bullet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d34817" fo:font-size="100%"/>
      </text:list-level-style-bullet>
      <text:list-level-style-bullet text:level="5" text:bullet-char="◦">
        <style:list-level-properties text:space-before="2.083cm" text:min-label-width="0.508cm"/>
        <style:text-properties fo:font-family="Calibri" style:font-family-generic="swiss" style:font-pitch="variable" fo:color="#d34817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d34817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OpenSymbol" fo:color="#69646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Diapositiva_20_de_20_título" style:display-name="Diapositiva de título" style:page-layout-name="PM1" draw:style-name="Mdp1">
      <loext:theme loext:name="Retrospección">
        <loext:theme-colors loext:name="Retrospección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d34817"/>
          <loext:color loext:name="accent2" loext:color="#9b2d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cc9900"/>
          <loext:color loext:name="followed-hyperlink" loext:color="#96a9a9"/>
        </loext:theme-colors>
      </loext:theme>
      <draw:custom-shape draw:name="Rectangle 6" draw:style-name="Mgr3" draw:text-style-name="MP5" draw:layer="backgroundobjects" drawooo:display="none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66cm" svg:height="0.184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7.939cm" svg:height="9.905cm" svg:x="3.048cm" svg:y="2.108cm" presentation:class="title" presentation:user-transformed="true">
        <draw:text-box>
          <text:p text:style-name="MP8"><text:span text:style-name="MT1">Haga clic para modificar el estilo de título del patrón</text:span></text:p>
        </draw:text-box>
      </draw:frame>
      <draw:frame draw:name="Date Placeholder 3" presentation:style-name="Mpr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4" presentation:style-name="Mpr2" draw:text-style-name="MP11" draw:layer="backgroundobjects" svg:width="13.396cm" svg:height="1.013cm" svg:x="10.239cm" svg:y="17.944cm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2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3"><text:page-number>&lt;número&gt;</text:page-number></text:span></text:p>
        </draw:text-box>
      </draw:frame>
      <draw:connector draw:name="Straight Connector 8" draw:style-name="Mgr5" draw:text-style-name="MP7" draw:layer="backgroundobjects" draw:type="line" svg:x1="3.354cm" svg:y1="12.065cm" svg:x2="30.786cm" svg:y2="12.065cm" svg:d="M3354 12065h27432" svg:viewBox="0 0 27433 1">
        <text:p/>
      </draw:connector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y_20_texto_20_vertical" style:display-name="Título y texto vertical" style:page-layout-name="PM1" draw:style-name="Mdp1">
      <loext:theme loext:name="Retrospección">
        <loext:theme-colors loext:name="Retrospección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d34817"/>
          <loext:color loext:name="accent2" loext:color="#9b2d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cc9900"/>
          <loext:color loext:name="followed-hyperlink" loext:color="#96a9a9"/>
        </loext:theme-colors>
      </loext:theme>
      <draw:custom-shape draw:name="Rectangle 6" draw:style-name="Mgr3" draw:text-style-name="MP5" draw:layer="backgroundobjects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66cm" svg:height="0.184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1" presentation:style-name="Mpr5" draw:text-style-name="MP16" draw:layer="backgroundobjects" svg:width="27.939cm" svg:height="4.029cm" svg:x="3.048cm" svg:y="0.796cm" presentation:class="title" presentation:user-transformed="true">
        <draw:text-box>
          <text:p text:style-name="MP15"><text:span text:style-name="MT4">Haga clic para modificar el estilo de título del patrón</text:span></text:p>
        </draw:text-box>
      </draw:frame>
      <draw:frame draw:name="Vertical Text Placeholder 2" presentation:style-name="Mpr6" draw:text-style-name="MP19" draw:layer="backgroundobjects" svg:width="27.939cm" svg:height="11.175cm" svg:x="3.048cm" svg:y="5.127cm" presentation:class="outline" presentation:user-transformed="true">
        <draw:text-box>
          <text:list text:style-name="ML6">
            <text:list-item>
              <text:p text:style-name="MP17"><text:span text:style-name="MT5">Haga clic para modificar los estilos de texto del patrón</text:span></text:p>
            </text:list-item>
          </text:list>
          <text:list text:style-name="ML7">
            <text:list-item>
              <text:list>
                <text:list-item>
                  <text:p text:style-name="MP18"><text:span text:style-name="MT6">Segundo ni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4" presentation:style-name="Mpr7" draw:text-style-name="MP11" draw:layer="backgroundobjects" svg:width="13.396cm" svg:height="1.013cm" svg:x="10.239cm" svg:y="17.944cm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7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3"><text:page-number>&lt;número&gt;</text:page-number></text:span></text:p>
        </draw:text-box>
      </draw:frame>
      <presentation:notes style:page-layout-name="PM0">
        <draw:page-thumbnail presentation:style-name="Título_20_y_20_texto_20_vertical-title" draw:layer="backgroundobjects" svg:width="0cm" svg:height="0cm" svg:x="0cm" svg:y="2.257cm" presentation:class="page"/>
        <draw:frame presentation:style-name="Título_20_y_20_texto_20_vertical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vertical_20_y_20_texto" style:display-name="Título vertical y texto" style:page-layout-name="PM1" draw:style-name="Mdp1">
      <loext:theme loext:name="Retrospección">
        <loext:theme-colors loext:name="Retrospección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d34817"/>
          <loext:color loext:name="accent2" loext:color="#9b2d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cc9900"/>
          <loext:color loext:name="followed-hyperlink" loext:color="#96a9a9"/>
        </loext:theme-colors>
      </loext:theme>
      <draw:custom-shape draw:name="Rectangle 6" draw:style-name="Mgr3" draw:text-style-name="MP5" draw:layer="backgroundobjects" drawooo:display="none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66cm" svg:height="0.184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Vertical Title 1" presentation:style-name="Mpr10" draw:text-style-name="MP16" draw:layer="backgroundobjects" svg:width="7.302cm" svg:height="15.999cm" svg:x="24.236cm" svg:y="1.145cm" presentation:class="title" presentation:user-transformed="true">
        <draw:text-box>
          <text:p text:style-name="MP15"><text:span text:style-name="MT4">Haga clic para modificar el estilo de título del patrón</text:span></text:p>
        </draw:text-box>
      </draw:frame>
      <draw:frame draw:name="Vertical Text Placeholder 2" presentation:style-name="Mpr11" draw:text-style-name="MP19" draw:layer="backgroundobjects" svg:width="21.483cm" svg:height="15.999cm" svg:x="2.328cm" svg:y="1.145cm" presentation:class="outline" presentation:user-transformed="true">
        <draw:text-box>
          <text:list text:style-name="ML6">
            <text:list-item>
              <text:p text:style-name="MP17"><text:span text:style-name="MT5">Haga clic para modificar los estilos de texto del patrón</text:span></text:p>
            </text:list-item>
          </text:list>
          <text:list text:style-name="ML7">
            <text:list-item>
              <text:list>
                <text:list-item>
                  <text:p text:style-name="MP18"><text:span text:style-name="MT6">Segundo ni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4" presentation:style-name="Mpr12" draw:text-style-name="MP11" draw:layer="backgroundobjects" svg:width="13.396cm" svg:height="1.013cm" svg:x="10.239cm" svg:y="17.944cm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12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3"><text:page-number>&lt;número&gt;</text:page-number></text:span></text:p>
        </draw:text-box>
      </draw:frame>
      <presentation:notes style:page-layout-name="PM0">
        <draw:page-thumbnail presentation:style-name="Título_20_vertical_20_y_20_texto-title" draw:layer="backgroundobjects" svg:width="0cm" svg:height="0cm" svg:x="0cm" svg:y="2.257cm" presentation:class="page"/>
        <draw:frame presentation:style-name="Título_20_vertical_20_y_20_texto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y_20_objetos" style:display-name="Título y objetos" style:page-layout-name="PM1" draw:style-name="Mdp1">
      <loext:theme loext:name="Retrospección">
        <loext:theme-colors loext:name="Retrospección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d34817"/>
          <loext:color loext:name="accent2" loext:color="#9b2d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cc9900"/>
          <loext:color loext:name="followed-hyperlink" loext:color="#96a9a9"/>
        </loext:theme-colors>
      </loext:theme>
      <draw:custom-shape draw:name="Rectangle 6" draw:style-name="Mgr3" draw:text-style-name="MP5" draw:layer="backgroundobjects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66cm" svg:height="0.184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1" presentation:style-name="Mpr15" draw:text-style-name="MP16" draw:layer="backgroundobjects" svg:width="27.939cm" svg:height="4.029cm" svg:x="3.048cm" svg:y="0.796cm" presentation:class="title" presentation:user-transformed="true">
        <draw:text-box>
          <text:p text:style-name="MP15"><text:span text:style-name="MT4">Haga clic para modificar el estilo de título del patrón</text:span></text:p>
        </draw:text-box>
      </draw:frame>
      <draw:frame draw:name="Content Placeholder 2" presentation:style-name="Mpr16" draw:text-style-name="MP19" draw:layer="backgroundobjects" svg:width="27.939cm" svg:height="11.175cm" svg:x="3.048cm" svg:y="5.127cm" presentation:class="outline" presentation:user-transformed="true">
        <draw:text-box>
          <text:list text:style-name="ML6">
            <text:list-item>
              <text:p text:style-name="MP17"><text:span text:style-name="MT5">Haga clic para modificar los estilos de texto del patrón</text:span></text:p>
            </text:list-item>
          </text:list>
          <text:list text:style-name="ML7">
            <text:list-item>
              <text:list>
                <text:list-item>
                  <text:p text:style-name="MP18"><text:span text:style-name="MT6">Segundo ni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4" presentation:style-name="Mpr17" draw:text-style-name="MP11" draw:layer="backgroundobjects" svg:width="13.396cm" svg:height="1.013cm" svg:x="10.239cm" svg:y="17.944cm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17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3"><text:page-number>&lt;número&gt;</text:page-number></text:span></text:p>
        </draw:text-box>
      </draw:frame>
      <presentation:notes style:page-layout-name="PM0">
        <draw:page-thumbnail presentation:style-name="Título_20_y_20_objetos-title" draw:layer="backgroundobjects" svg:width="0cm" svg:height="0cm" svg:x="0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Encabezado_20_de_20_sección" style:display-name="Encabezado de sección" style:page-layout-name="PM1" draw:style-name="Mdp1">
      <loext:theme loext:name="Retrospección">
        <loext:theme-colors loext:name="Retrospección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d34817"/>
          <loext:color loext:name="accent2" loext:color="#9b2d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cc9900"/>
          <loext:color loext:name="followed-hyperlink" loext:color="#96a9a9"/>
        </loext:theme-colors>
      </loext:theme>
      <draw:custom-shape draw:name="Rectangle 6" draw:style-name="Mgr3" draw:text-style-name="MP5" draw:layer="backgroundobjects" drawooo:display="none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66cm" svg:height="0.184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0" draw:text-style-name="MP9" draw:layer="backgroundobjects" svg:width="27.939cm" svg:height="9.905cm" svg:x="3.048cm" svg:y="2.108cm" presentation:class="title" presentation:user-transformed="true">
        <draw:text-box>
          <text:p text:style-name="MP8"><text:span text:style-name="MT1">Haga clic para modificar el estilo de título del patrón</text:span></text:p>
        </draw:text-box>
      </draw:frame>
      <draw:frame draw:name="Text Placeholder 2" presentation:style-name="Mpr21" draw:text-style-name="MP21" draw:layer="backgroundobjects" svg:width="27.939cm" svg:height="3.174cm" svg:x="3.048cm" svg:y="12.37cm" presentation:class="outline" presentation:user-transformed="true">
        <draw:text-box>
          <text:p text:style-name="MP20"><text:span text:style-name="MT8">Haga clic para modificar los estilos de texto del patrón</text:span></text:p>
        </draw:text-box>
      </draw:frame>
      <draw:frame draw:name="Date Placeholder 3" presentation:style-name="Mpr2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4" presentation:style-name="Mpr22" draw:text-style-name="MP11" draw:layer="backgroundobjects" svg:width="13.396cm" svg:height="1.013cm" svg:x="10.239cm" svg:y="17.944cm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22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3"><text:page-number>&lt;número&gt;</text:page-number></text:span></text:p>
        </draw:text-box>
      </draw:frame>
      <draw:connector draw:name="Straight Connector 8" draw:style-name="Mgr5" draw:text-style-name="MP7" draw:layer="backgroundobjects" draw:type="line" svg:x1="3.354cm" svg:y1="12.065cm" svg:x2="30.786cm" svg:y2="12.065cm" svg:d="M3354 12065h27432" svg:viewBox="0 0 27433 1">
        <text:p/>
      </draw:connector>
      <presentation:notes style:page-layout-name="PM0">
        <draw:page-thumbnail presentation:style-name="Encabezado_20_de_20_sección-title" draw:layer="backgroundobjects" svg:width="0cm" svg:height="0cm" svg:x="0cm" svg:y="2.257cm" presentation:class="page"/>
        <draw:frame presentation:style-name="Encabezado_20_de_20_secció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Dos_20_objetos" style:display-name="Dos objetos" style:page-layout-name="PM1" draw:style-name="Mdp1">
      <loext:theme loext:name="Retrospección">
        <loext:theme-colors loext:name="Retrospección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d34817"/>
          <loext:color loext:name="accent2" loext:color="#9b2d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cc9900"/>
          <loext:color loext:name="followed-hyperlink" loext:color="#96a9a9"/>
        </loext:theme-colors>
      </loext:theme>
      <draw:custom-shape draw:name="Rectangle 6" draw:style-name="Mgr3" draw:text-style-name="MP5" draw:layer="backgroundobjects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66cm" svg:height="0.184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7" presentation:style-name="Mpr25" draw:text-style-name="MP16" draw:layer="backgroundobjects" svg:width="27.939cm" svg:height="4.029cm" svg:x="3.048cm" svg:y="0.796cm" presentation:class="title" presentation:user-transformed="true">
        <draw:text-box>
          <text:p text:style-name="MP15"><text:span text:style-name="MT4">Haga clic para modificar el estilo de título del patrón</text:span></text:p>
        </draw:text-box>
      </draw:frame>
      <draw:frame draw:name="Content Placeholder 2" presentation:style-name="Mpr26" draw:text-style-name="MP19" draw:layer="backgroundobjects" svg:width="13.715cm" svg:height="11.175cm" svg:x="3.048cm" svg:y="5.127cm" presentation:class="outline" presentation:user-transformed="true">
        <draw:text-box>
          <text:list text:style-name="ML6">
            <text:list-item>
              <text:p text:style-name="MP17"><text:span text:style-name="MT5">Haga clic para modificar los estilos de texto del patrón</text:span></text:p>
            </text:list-item>
          </text:list>
          <text:list text:style-name="ML7">
            <text:list-item>
              <text:list>
                <text:list-item>
                  <text:p text:style-name="MP18"><text:span text:style-name="MT6">Segundo ni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9" draw:layer="backgroundobjects" svg:width="13.715cm" svg:height="11.175cm" svg:x="17.272cm" svg:y="5.127cm" presentation:class="outline" presentation:user-transformed="true">
        <draw:text-box>
          <text:list text:style-name="ML6">
            <text:list-item>
              <text:p text:style-name="MP17"><text:span text:style-name="MT5">Haga clic para modificar los estilos de texto del patrón</text:span></text:p>
            </text:list-item>
          </text:list>
          <text:list text:style-name="ML7">
            <text:list-item>
              <text:list>
                <text:list-item>
                  <text:p text:style-name="MP18"><text:span text:style-name="MT6">Segundo ni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5" presentation:style-name="Mpr27" draw:text-style-name="MP11" draw:layer="backgroundobjects" svg:width="13.396cm" svg:height="1.013cm" svg:x="10.239cm" svg:y="17.944cm" presentation:class="footer" presentation:user-transformed="true">
        <draw:text-box>
          <text:p text:style-name="MP12"><presentation:footer/></text:p>
        </draw:text-box>
      </draw:frame>
      <draw:frame draw:name="Slide Number Placeholder 6" presentation:style-name="Mpr27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3"><text:page-number>&lt;número&gt;</text:page-number></text:span></text:p>
        </draw:text-box>
      </draw:frame>
      <presentation:notes style:page-layout-name="PM0">
        <draw:page-thumbnail presentation:style-name="Dos_20_objetos-title" draw:layer="backgroundobjects" svg:width="0cm" svg:height="0cm" svg:x="0cm" svg:y="2.257cm" presentation:class="page"/>
        <draw:frame presentation:style-name="Dos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omparación" style:page-layout-name="PM1" draw:style-name="Mdp1">
      <loext:theme loext:name="Retrospección">
        <loext:theme-colors loext:name="Retrospección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d34817"/>
          <loext:color loext:name="accent2" loext:color="#9b2d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cc9900"/>
          <loext:color loext:name="followed-hyperlink" loext:color="#96a9a9"/>
        </loext:theme-colors>
      </loext:theme>
      <draw:custom-shape draw:name="Rectangle 6" draw:style-name="Mgr3" draw:text-style-name="MP5" draw:layer="backgroundobjects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66cm" svg:height="0.184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9" presentation:style-name="Mpr30" draw:text-style-name="MP16" draw:layer="backgroundobjects" svg:width="27.939cm" svg:height="4.029cm" svg:x="3.048cm" svg:y="0.796cm" presentation:class="title" presentation:user-transformed="true">
        <draw:text-box>
          <text:p text:style-name="MP15"><text:span text:style-name="MT4">Haga clic para modificar el estilo de título del patrón</text:span></text:p>
        </draw:text-box>
      </draw:frame>
      <draw:frame draw:name="Text Placeholder 2" presentation:style-name="Mpr31" draw:text-style-name="MP19" draw:layer="backgroundobjects" svg:width="13.715cm" svg:height="2.044cm" svg:x="3.048cm" svg:y="5.128cm" presentation:class="outline" presentation:user-transformed="true">
        <draw:text-box>
          <text:p text:style-name="MP22"><text:span text:style-name="MT9">Haga clic para modificar los estilos de texto del patrón</text:span></text:p>
        </draw:text-box>
      </draw:frame>
      <draw:frame draw:name="Content Placeholder 3" presentation:style-name="Mpr32" draw:text-style-name="MP19" draw:layer="backgroundobjects" svg:width="13.715cm" svg:height="9.383cm" svg:x="3.048cm" svg:y="7.173cm" presentation:class="outline" presentation:user-transformed="true">
        <draw:text-box>
          <text:list text:style-name="ML6">
            <text:list-item>
              <text:p text:style-name="MP17"><text:span text:style-name="MT5">Haga clic para modificar los estilos de texto del patrón</text:span></text:p>
            </text:list-item>
          </text:list>
          <text:list text:style-name="ML7">
            <text:list-item>
              <text:list>
                <text:list-item>
                  <text:p text:style-name="MP18"><text:span text:style-name="MT6">Segundo ni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9" draw:layer="backgroundobjects" svg:width="13.715cm" svg:height="2.044cm" svg:x="17.272cm" svg:y="5.128cm" presentation:class="outline" presentation:user-transformed="true">
        <draw:text-box>
          <text:p text:style-name="MP22"><text:span text:style-name="MT9">Haga clic para modificar los estilos de texto del patrón</text:span></text:p>
        </draw:text-box>
      </draw:frame>
      <draw:frame draw:name="Content Placeholder 5" presentation:style-name="Mpr32" draw:text-style-name="MP19" draw:layer="backgroundobjects" svg:width="13.715cm" svg:height="9.383cm" svg:x="17.272cm" svg:y="7.173cm" presentation:class="outline" presentation:user-transformed="true">
        <draw:text-box>
          <text:list text:style-name="ML6">
            <text:list-item>
              <text:p text:style-name="MP17"><text:span text:style-name="MT5">Haga clic para modificar los estilos de texto del patrón</text:span></text:p>
            </text:list-item>
          </text:list>
          <text:list text:style-name="ML7">
            <text:list-item>
              <text:list>
                <text:list-item>
                  <text:p text:style-name="MP18"><text:span text:style-name="MT6">Segundo ni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7" presentation:style-name="Mpr33" draw:text-style-name="MP11" draw:layer="backgroundobjects" svg:width="13.396cm" svg:height="1.013cm" svg:x="10.239cm" svg:y="17.944cm" presentation:class="footer" presentation:user-transformed="true">
        <draw:text-box>
          <text:p text:style-name="MP12"><presentation:footer/></text:p>
        </draw:text-box>
      </draw:frame>
      <draw:frame draw:name="Slide Number Placeholder 8" presentation:style-name="Mpr33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3"><text:page-number>&lt;número&gt;</text:page-number></text:span></text:p>
        </draw:text-box>
      </draw:frame>
      <presentation:notes style:page-layout-name="PM0">
        <draw:page-thumbnail presentation:style-name="Comparación-title" draw:layer="backgroundobjects" svg:width="0cm" svg:height="0cm" svg:x="0cm" svg:y="2.257cm" presentation:class="page"/>
        <draw:frame presentation:style-name="Comparació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olo_20_el_20_título" style:display-name="Solo el título" style:page-layout-name="PM1" draw:style-name="Mdp1">
      <loext:theme loext:name="Retrospección">
        <loext:theme-colors loext:name="Retrospección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d34817"/>
          <loext:color loext:name="accent2" loext:color="#9b2d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cc9900"/>
          <loext:color loext:name="followed-hyperlink" loext:color="#96a9a9"/>
        </loext:theme-colors>
      </loext:theme>
      <draw:custom-shape draw:name="Rectangle 6" draw:style-name="Mgr3" draw:text-style-name="MP5" draw:layer="backgroundobjects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66cm" svg:height="0.184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1" presentation:style-name="Mpr36" draw:text-style-name="MP16" draw:layer="backgroundobjects" svg:width="27.939cm" svg:height="4.029cm" svg:x="3.048cm" svg:y="0.796cm" presentation:class="title" presentation:user-transformed="true">
        <draw:text-box>
          <text:p text:style-name="MP15"><text:span text:style-name="MT4">Haga clic para modificar el estilo de título del patrón</text:span></text:p>
        </draw:text-box>
      </draw:frame>
      <draw:frame draw:name="Date Placeholder 2" presentation:style-name="Mpr3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3" presentation:style-name="Mpr37" draw:text-style-name="MP11" draw:layer="backgroundobjects" svg:width="13.396cm" svg:height="1.013cm" svg:x="10.239cm" svg:y="17.944cm" presentation:class="footer" presentation:user-transformed="true">
        <draw:text-box>
          <text:p text:style-name="MP12"><presentation:footer/></text:p>
        </draw:text-box>
      </draw:frame>
      <draw:frame draw:name="Slide Number Placeholder 4" presentation:style-name="Mpr37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3"><text:page-number>&lt;número&gt;</text:page-number></text:span></text:p>
        </draw:text-box>
      </draw:frame>
      <presentation:notes style:page-layout-name="PM0">
        <draw:page-thumbnail presentation:style-name="Solo_20_el_20_título-title" draw:layer="backgroundobjects" svg:width="0cm" svg:height="0cm" svg:x="0cm" svg:y="2.257cm" presentation:class="page"/>
        <draw:frame presentation:style-name="Solo_20_el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En_20_blanco" style:display-name="En blanco" style:page-layout-name="PM1" draw:style-name="Mdp1">
      <loext:theme loext:name="Retrospección">
        <loext:theme-colors loext:name="Retrospección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d34817"/>
          <loext:color loext:name="accent2" loext:color="#9b2d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cc9900"/>
          <loext:color loext:name="followed-hyperlink" loext:color="#96a9a9"/>
        </loext:theme-colors>
      </loext:theme>
      <draw:custom-shape draw:name="Rectangle 6" draw:style-name="Mgr3" draw:text-style-name="MP5" draw:layer="backgroundobjects" drawooo:display="none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66cm" svg:height="0.184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4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4" draw:text-style-name="MP6" draw:layer="backgroundobjects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6" presentation:style-name="Mpr40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7" presentation:style-name="Mpr40" draw:text-style-name="MP11" draw:layer="backgroundobjects" svg:width="13.396cm" svg:height="1.013cm" svg:x="10.239cm" svg:y="17.944cm" presentation:class="footer" presentation:user-transformed="true">
        <draw:text-box>
          <text:p text:style-name="MP12"><presentation:footer/></text:p>
        </draw:text-box>
      </draw:frame>
      <draw:frame draw:name="Slide Number Placeholder 8" presentation:style-name="Mpr40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3"><text:page-number>&lt;número&gt;</text:page-number></text:span></text:p>
        </draw:text-box>
      </draw:frame>
      <presentation:notes style:page-layout-name="PM0">
        <draw:page-thumbnail presentation:style-name="En_20_blanco-title" draw:layer="backgroundobjects" svg:width="0cm" svg:height="0cm" svg:x="0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ontenido_20_con_20_título" style:display-name="Contenido con título" style:page-layout-name="PM1" draw:style-name="Mdp1">
      <loext:theme loext:name="Retrospección">
        <loext:theme-colors loext:name="Retrospección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d34817"/>
          <loext:color loext:name="accent2" loext:color="#9b2d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cc9900"/>
          <loext:color loext:name="followed-hyperlink" loext:color="#96a9a9"/>
        </loext:theme-colors>
      </loext:theme>
      <draw:custom-shape draw:name="Rectangle 6" draw:style-name="Mgr3" draw:text-style-name="MP5" draw:layer="backgroundobjects" drawooo:display="none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66cm" svg:height="0.184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7" draw:style-name="Mgr3" draw:text-style-name="MP5" draw:layer="backgroundobjects" svg:width="11.251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0.177cm" svg:height="19.049cm" svg:x="11.222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3" draw:text-style-name="MP24" draw:layer="backgroundobjects" svg:width="8.889cm" svg:height="6.349cm" svg:x="1.27cm" svg:y="1.651cm" presentation:class="title" presentation:user-transformed="true">
        <draw:text-box>
          <text:p text:style-name="MP23"><text:span text:style-name="MT10">Haga clic para modificar el estilo de título del patrón</text:span></text:p>
        </draw:text-box>
      </draw:frame>
      <draw:frame draw:name="Content Placeholder 2" presentation:style-name="Mpr44" draw:text-style-name="MP19" draw:layer="backgroundobjects" svg:width="18.033cm" svg:height="14.604cm" svg:x="13.335cm" svg:y="2.032cm" presentation:class="outline" presentation:user-transformed="true">
        <draw:text-box>
          <text:list text:style-name="ML6">
            <text:list-item>
              <text:p text:style-name="MP17"><text:span text:style-name="MT5">Haga clic para modificar los estilos de texto del patrón</text:span></text:p>
            </text:list-item>
          </text:list>
          <text:list text:style-name="ML7">
            <text:list-item>
              <text:list>
                <text:list-item>
                  <text:p text:style-name="MP18"><text:span text:style-name="MT6">Segundo ni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5" draw:text-style-name="MP26" draw:layer="backgroundobjects" svg:width="8.889cm" svg:height="9.385cm" svg:x="1.27cm" svg:y="8.128cm" presentation:class="outline" presentation:user-transformed="true">
        <draw:text-box>
          <text:p text:style-name="MP25"><text:span text:style-name="MT11">Haga clic para modificar los estilos de texto del patrón</text:span></text:p>
        </draw:text-box>
      </draw:frame>
      <draw:frame draw:name="Date Placeholder 4" presentation:style-name="Mpr46" draw:text-style-name="MP11" draw:layer="backgroundobjects" svg:width="7.273cm" svg:height="1.013cm" svg:x="1.293cm" svg:y="17.944cm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5" presentation:style-name="Mpr46" draw:text-style-name="MP11" draw:layer="backgroundobjects" svg:width="12.911cm" svg:height="1.013cm" svg:x="13.335cm" svg:y="17.944cm" presentation:class="footer" presentation:user-transformed="true">
        <draw:text-box>
          <text:p text:style-name="MP12"><presentation:footer/></text:p>
        </draw:text-box>
      </draw:frame>
      <draw:frame draw:name="Slide Number Placeholder 6" presentation:style-name="Mpr46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12"><text:page-number>&lt;número&gt;</text:page-number></text:span></text:p>
        </draw:text-box>
      </draw:frame>
      <presentation:notes style:page-layout-name="PM0">
        <draw:page-thumbnail presentation:style-name="Contenido_20_con_20_título-title" draw:layer="backgroundobjects" svg:width="0cm" svg:height="0cm" svg:x="0cm" svg:y="2.257cm" presentation:class="page"/>
        <draw:frame presentation:style-name="Contenido_20_con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Imagen_20_con_20_título" style:display-name="Imagen con título" style:page-layout-name="PM1" draw:style-name="Mdp1">
      <loext:theme loext:name="Retrospección">
        <loext:theme-colors loext:name="Retrospección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d34817"/>
          <loext:color loext:name="accent2" loext:color="#9b2d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cc9900"/>
          <loext:color loext:name="followed-hyperlink" loext:color="#96a9a9"/>
        </loext:theme-colors>
      </loext:theme>
      <draw:custom-shape draw:name="Rectangle 6" draw:style-name="Mgr3" draw:text-style-name="MP5" draw:layer="backgroundobjects" drawooo:display="none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66cm" svg:height="0.184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7" draw:style-name="Mgr3" draw:text-style-name="MP5" draw:layer="backgroundobjects" svg:width="33.857cm" svg:height="5.291cm" svg:x="0cm" svg:y="13.75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3.65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9" draw:text-style-name="MP24" draw:layer="backgroundobjects" svg:width="28.092cm" svg:height="2.285cm" svg:x="3.048cm" svg:y="14.097cm" presentation:class="title" presentation:user-transformed="true">
        <draw:text-box>
          <text:p text:style-name="MP23"><text:span text:style-name="MT10">Haga clic para modificar el estilo de título del patrón</text:span></text:p>
        </draw:text-box>
      </draw:frame>
      <draw:frame draw:name="Picture Placeholder 2" presentation:style-name="Mpr50" draw:text-style-name="MP28" draw:layer="backgroundobjects" svg:width="33.866cm" svg:height="13.652cm" svg:x="0cm" svg:y="0cm" presentation:class="outline" presentation:user-transformed="true">
        <draw:text-box>
          <text:p text:style-name="MP27"><text:span text:style-name="MT13">Haga clic en el icono para agregar una imagen</text:span></text:p>
        </draw:text-box>
      </draw:frame>
      <draw:frame draw:name="Text Placeholder 3" presentation:style-name="Mpr51" draw:text-style-name="MP26" draw:layer="backgroundobjects" svg:width="28.091cm" svg:height="1.65cm" svg:x="3.048cm" svg:y="16.408cm" presentation:class="outline" presentation:user-transformed="true">
        <draw:text-box>
          <text:p text:style-name="MP29"><text:span text:style-name="MT11">Haga clic para modificar los estilos de texto del patrón</text:span></text:p>
        </draw:text-box>
      </draw:frame>
      <draw:frame draw:name="Date Placeholder 4" presentation:style-name="Mpr5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5" presentation:style-name="Mpr52" draw:text-style-name="MP11" draw:layer="backgroundobjects" svg:width="13.396cm" svg:height="1.013cm" svg:x="10.239cm" svg:y="17.944cm" presentation:class="footer" presentation:user-transformed="true">
        <draw:text-box>
          <text:p text:style-name="MP12"><presentation:footer/></text:p>
        </draw:text-box>
      </draw:frame>
      <draw:frame draw:name="Slide Number Placeholder 6" presentation:style-name="Mpr52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3"><text:page-number>&lt;número&gt;</text:page-number></text:span></text:p>
        </draw:text-box>
      </draw:frame>
      <presentation:notes style:page-layout-name="PM0">
        <draw:page-thumbnail presentation:style-name="Imagen_20_con_20_título-title" draw:layer="backgroundobjects" svg:width="0cm" svg:height="0cm" svg:x="0cm" svg:y="2.257cm" presentation:class="page"/>
        <draw:frame presentation:style-name="Imagen_20_con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troducción, entorno de los negocios internacionales y la inteligencia comercial</dc:title>
    <meta:initial-creator>Sofía mieses</meta:initial-creator>
    <dc:creator>Sofía mieses</dc:creator>
    <meta:editing-cycles>12</meta:editing-cycles>
    <meta:creation-date>2022-09-20T02:40:12</meta:creation-date>
    <dc:date>2023-04-26T20:13:53</dc:date>
    <meta:editing-duration>P4DT20H18M</meta:editing-duration>
    <meta:generator>LibreOffice/24.2.4.2$Linux_X86_64 LibreOffice_project/420$Build-2</meta:generator>
    <meta:document-statistic meta:object-count="346"/>
    <meta:user-defined meta:name="AppVersion">16.0000</meta:user-defined>
    <meta:user-defined meta:name="PresentationFormat">Panorámica</meta:user-defined>
    <meta:user-defined meta:name="Slides" meta:value-type="float">19</meta:user-defined>
    <meta:template xlink:type="simple" xlink:actuate="onRequest" xlink:title="Retrospect" xlink:href=""/>
  </office:meta>
</office:document-meta>
</file>