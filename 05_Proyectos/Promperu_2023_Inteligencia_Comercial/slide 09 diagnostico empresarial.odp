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40000012CCB7AAFF1.jpg" manifest:media-type="image/jpeg"/>
  <manifest:file-entry manifest:full-path="Pictures/1000000000000780000004387E10B697.png" manifest:media-type="image/png"/>
  <manifest:file-entry manifest:full-path="Pictures/100000000000078000000438FE0F3C3B.png" manifest:media-type="image/png"/>
  <manifest:file-entry manifest:full-path="Pictures/10000000000007090000081C920347EC.png" manifest:media-type="image/png"/>
  <manifest:file-entry manifest:full-path="Pictures/1000000000000780000004385AEBAED7.png" manifest:media-type="image/png"/>
  <manifest:file-entry manifest:full-path="Pictures/1000000000000780000004382D0292A4.png" manifest:media-type="image/png"/>
  <manifest:file-entry manifest:full-path="Pictures/10000000000007D0000002F15D4B179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285cm, 14.804cm, 4.292cm, 19.304cm)" draw:image-opacity="100%" style:mirror="none" loext:decorative="false"/>
    </style:style>
    <style:style style:name="gr3" style:family="graphic" style:parent-style-name="standard">
      <style:graphic-properties draw:stroke="solid" svg:stroke-width="0.044cm" svg:stroke-color="#ffffff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light1" loext:color-type="theme"/>
        <loext:fill-complex-color loext:theme-type="light1" loext:color-type="theme"/>
      </style:graphic-properties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47cm, 10.146cm, 4.762cm, 8.889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563cm, 3.866cm, 4.22cm, 3.266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35cm, 10.11cm, 2.164cm, 3.773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094cm, 7.409cm, 3.347cm, 2.394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6" style:family="presentation" style:parent-style-name="Título_20_y_20_objetos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ítulo_20_y_20_objetos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8" style:family="presentation" style:parent-style-name="Título_20_y_20_objetos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9" style:family="presentation" style:parent-style-name="Título_20_y_20_objetos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10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ítulo_20_y_20_objetos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12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1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P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2" style:family="paragraph">
      <loext:graphic-properties draw:fill="none"/>
      <style:paragraph-properties fo:margin-left="0cm" fo:margin-right="0cm" fo:margin-top="0.423cm" fo:margin-bottom="0.071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es" fo:country="PE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" style:family="text">
      <style:text-properties fo:text-transform="uppercase" fo:color="#637052" loext:opacity="100%" style:text-outline="false" style:text-line-through-style="none" style:text-line-through-type="none" style:text-position="0% 100%" style:font-name="Calibri Light" fo:font-size="24pt" fo:letter-spacing="0.071cm" fo:language="es" fo:country="P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es" fo:country="PE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es" fo:country="P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es" fo:country="P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P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4pt" fo:letter-spacing="-0.018cm" fo:language="es" fo:country="P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32pt" fo:letter-spacing="normal" fo:language="es" fo:country="P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4831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7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1.27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Diagnóstico empresarial" draw:style-name="dp1" draw:master-page-name="Diapositiva_20_de_20_título" presentation:presentation-page-layout-name="AL1T0">
        <draw:frame draw:name="Título 1" presentation:style-name="pr1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Diagnóstico empresarial</text:span></text:p>
          </draw:text-box>
        </draw:frame>
        <draw:frame draw:name="Subtítulo 2" presentation:style-name="pr2" draw:text-style-name="P4" draw:layer="layout" svg:width="27.939cm" svg:height="3.174cm" svg:x="3.056cm" svg:y="12.377cm" presentation:class="subtitle" presentation:user-transformed="true">
          <draw:text-box>
            <text:p text:style-name="P3"><text:span text:style-name="T2">5 de may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ivo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Objetivo</text:span></text:p>
          </draw:text-box>
        </draw:frame>
        <draw:frame draw:name="Marcador de contenido 2" presentation:style-name="pr5" draw:text-style-name="P8" draw:layer="layout" svg:width="27.939cm" svg:height="10.532cm" svg:x="3.048cm" svg:y="5.77cm" presentation:class="outline" presentation:user-transformed="true">
          <draw:text-box>
            <text:list text:style-name="L4">
              <text:list-item>
                <text:p text:style-name="P7"><text:span text:style-name="T4">Evaluar la situación de la empresa a través del análisis de la situación o desarrollo actual que enfrenta para planificar soluciones.</text:span></text:p>
              </text:list-item>
              <text:list-item>
                <text:p text:style-name="P7"><text:span text:style-name="T5">Específico:</text:span></text:p>
              </text:list-item>
            </text:list>
            <text:list text:style-name="L5">
              <text:list-item>
                <text:p text:style-name="P7"><text:span text:style-name="T4">Analizar la situación actual en la empresa con base en los 5 vectores.</text:span></text:p>
              </text:list-item>
              <text:list-item>
                <text:p text:style-name="P7"><text:span text:style-name="T4">Diagnosticar las áreas de oportunidad de mejora para incrementar la productividad y competitividad.</text:span></text:p>
              </text:list-item>
              <text:list-item>
                <text:p text:style-name="P7"><text:span text:style-name="T4">Determinar un plan de mejora.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ntos importantes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Puntos importantes</text:span></text:p>
          </draw:text-box>
        </draw:frame>
        <draw:frame draw:name="Marcador de contenido 2" presentation:style-name="pr5" draw:text-style-name="P8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7"><text:span text:style-name="T4">¿Cómo surgió la idea de negocio, sus antecedentes?</text:span></text:p>
              </text:list-item>
              <text:list-item>
                <text:p text:style-name="P7"><text:span text:style-name="T4">¿Cuál es el objetivo de la organización?</text:span></text:p>
              </text:list-item>
              <text:list-item>
                <text:p text:style-name="P7"><text:span text:style-name="T4">¿Qué valores son importantes para la empresa?</text:span></text:p>
              </text:list-item>
              <text:list-item>
                <text:p text:style-name="P7"><text:span text:style-name="T4">¿Quién define los objetivos?</text:span></text:p>
              </text:list-item>
              <text:list-item>
                <text:p text:style-name="P7"><text:span text:style-name="T4">Sus procesos están documentados y hechos con visión</text:span></text:p>
              </text:list-item>
              <text:list-item>
                <text:p text:style-name="P7"><text:span text:style-name="T4">Son necesarias todas las funciones. </text:span></text:p>
              </text:list-item>
              <text:list-item>
                <text:p text:style-name="P7"><text:span text:style-name="T4">Forma legal de la empresa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ntágono de la empresa 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Pentágono de la empresa </text:span></text:p>
          </draw:text-box>
        </draw:frame>
        <draw:frame draw:name="Marcador de contenido 2" presentation:style-name="pr5" draw:text-style-name="P8" draw:layer="layout" svg:width="12.978cm" svg:height="10.266cm" svg:x="3.048cm" svg:y="6.036cm" presentation:class="outline" presentation:user-transformed="true">
          <draw:text-box>
            <text:list text:style-name="L5">
              <text:list-item>
                <text:p text:style-name="P7"><text:span text:style-name="T4">¿En que estado se encuentra tu empresa?</text:span></text:p>
              </text:list-item>
              <text:list-item>
                <text:p text:style-name="P7"><text:span text:style-name="T4">¿Tus colaboradores son felices en su trabajo y han tenido crecimiento?</text:span></text:p>
              </text:list-item>
              <text:list-item>
                <text:p text:style-name="P7"><text:span text:style-name="T4">¿El colaborador tiene clara su función?</text:span></text:p>
              </text:list-item>
              <text:list-item>
                <text:p text:style-name="P7"><text:span text:style-name="T4">¿Crees que el negocio es rentable?</text:span></text:p>
              </text:list-item>
              <text:list-item>
                <text:p text:style-name="P7"><text:span text:style-name="T4">¿Como impactan las ventas en el negocio?</text:span></text:p>
              </text:list-item>
            </text:list>
            <text:p text:style-name="P7"><text:span text:style-name="T4"/></text:p>
          </draw:text-box>
        </draw:frame>
        <draw:frame draw:name="Imagen 4" draw:style-name="gr2" draw:text-style-name="P9" draw:layer="layout" svg:width="11.124cm" svg:height="9.33cm" svg:x="19.693cm" svg:y="6.036cm">
          <draw:image xlink:href="Pictures/1000000000000780000004382D0292A4.png" xlink:type="simple" xlink:show="embed" xlink:actuate="onLoad" draw:mime-type="image/png">
            <text:p/>
          </draw:image>
        </draw:frame>
        <draw:custom-shape draw:name="Rectángulo 5" draw:style-name="gr3" draw:text-style-name="P11" draw:layer="layout" svg:width="0.659cm" svg:height="0.761cm" svg:x="19.431cm" svg:y="7.874cm"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ntágono de la empresa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Pentágono de la empresa</text:span></text:p>
          </draw:text-box>
        </draw:frame>
        <draw:frame draw:name="Marcador de contenido 2" presentation:style-name="pr7" draw:text-style-name="P12" draw:layer="layout" svg:width="27.939cm" svg:height="11.175cm" svg:x="3.048cm" svg:y="5.127cm" presentation:class="outline" presentation:placeholder="true" presentation:user-transformed="true">
          <draw:text-box/>
        </draw:frame>
        <draw:frame draw:name="Imagen 6" draw:style-name="gr4" draw:text-style-name="P9" draw:layer="layout" svg:width="26.517cm" svg:height="11.991cm" svg:x="3.675cm" svg:y="5.127cm">
          <draw:image xlink:href="Pictures/1000000000000780000004385AEBAE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álisis FODA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Análisis FODA</text:span></text:p>
          </draw:text-box>
        </draw:frame>
        <draw:frame draw:name="Marcador de contenido 2" presentation:style-name="pr8" draw:text-style-name="P12" draw:layer="layout" svg:width="27.939cm" svg:height="11.175cm" svg:x="3.048cm" svg:y="5.127cm" presentation:class="outline" presentation:placeholder="true" presentation:user-transformed="true">
          <draw:text-box/>
        </draw:frame>
        <draw:frame draw:name="Picture 2" draw:style-name="gr5" draw:text-style-name="P9" draw:layer="layout" svg:width="15.288cm" svg:height="15.844cm" svg:x="15.529cm" svg:y="1.366cm">
          <draw:image xlink:href="Pictures/10000000000007090000081C920347EC.png" xlink:type="simple" xlink:show="embed" xlink:actuate="onLoad" draw:mime-type="image/png">
            <text:p/>
          </draw:image>
          <svg:desc>Análisis FODA: qué es y cómo usarlo (con ejemplos) • Asana</svg:desc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álisis de Vectores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Análisis de Vectores</text:span></text:p>
          </draw:text-box>
        </draw:frame>
        <draw:frame draw:name="Marcador de contenido 2" presentation:style-name="pr9" draw:text-style-name="P12" draw:layer="layout" svg:width="27.939cm" svg:height="11.175cm" svg:x="3.048cm" svg:y="5.127cm" presentation:class="outline" presentation:placeholder="true" presentation:user-transformed="true">
          <draw:text-box/>
        </draw:frame>
        <draw:frame draw:name="Imagen 4" draw:style-name="gr6" draw:text-style-name="P9" draw:layer="layout" svg:width="20.178cm" svg:height="12.394cm" svg:x="5.77cm" svg:y="4.826cm">
          <draw:image xlink:href="Pictures/100000000000078000000438FE0F3C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álisis de Vectores – Niveles de madurez" draw:style-name="dp1" draw:master-page-name="Título_20_y_20_objetos" presentation:presentation-page-layout-name="AL2T11">
        <draw:frame draw:name="Título 1" presentation:style-name="pr10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7">Análisis de Vectores – Niveles de madurez</text:span></text:p>
          </draw:text-box>
        </draw:frame>
        <draw:frame draw:name="Marcador de contenido 2" presentation:style-name="pr11" draw:text-style-name="P12" draw:layer="layout" svg:width="27.939cm" svg:height="11.175cm" svg:x="3.048cm" svg:y="5.127cm" presentation:class="outline" presentation:placeholder="true" presentation:user-transformed="true">
          <draw:text-box/>
        </draw:frame>
        <draw:frame draw:name="Imagen 4" draw:style-name="gr7" draw:text-style-name="P9" draw:layer="layout" svg:width="27.329cm" svg:height="8.753cm" svg:x="3.268cm" svg:y="6.609cm">
          <draw:image xlink:href="Pictures/1000000000000780000004387E10B6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étodos que maneja Promperu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Métodos que maneja Promperu</text:span></text:p>
          </draw:text-box>
        </draw:frame>
        <draw:frame draw:name="Marcador de contenido 2" presentation:style-name="pr12" draw:text-style-name="P8" draw:layer="layout" svg:width="9.898cm" svg:height="1.284cm" svg:x="5.376cm" svg:y="9.985cm" presentation:class="outline" presentation:user-transformed="true">
          <draw:text-box>
            <text:list text:style-name="L4">
              <text:list-item>
                <text:p text:style-name="P7"><text:span text:style-name="T8">Test Exportador</text:span></text:p>
              </text:list-item>
            </text:list>
          </draw:text-box>
        </draw:frame>
        <draw:frame draw:name="Picture 2" draw:style-name="gr8" draw:text-style-name="P9" draw:layer="layout" svg:width="7.769cm" svg:height="10.994cm" svg:x="18.592cm" svg:y="5.375cm">
          <draw:image xlink:href="Pictures/10000000000000D40000012CCB7AAFF1.jpg" xlink:type="simple" xlink:show="embed" xlink:actuate="onLoad" draw:mime-type="image/jpeg">
            <text:p/>
          </draw:image>
          <svg:desc>Guía N° 04 Test exportador</svg:desc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¡Gracias!" draw:style-name="dp1" draw:master-page-name="Título_20_y_20_objetos" presentation:presentation-page-layout-name="AL2T11">
        <draw:frame draw:name="Título 1" presentation:style-name="pr4" draw:text-style-name="P6" draw:layer="layout" svg:width="27.939cm" svg:height="2.014cm" svg:x="2.963cm" svg:y="8.518cm" presentation:class="title" presentation:user-transformed="true">
          <draw:text-box>
            <text:p text:style-name="P1"><text:span text:style-name="T3">¡Gracia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sFillBitmap_20_1" draw:display-name="msFillBitmap 1" xlink:href="Pictures/10000000000007D0000002F15D4B179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P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texto_20_vertical-background" style:display-name="Título y texto vertical-background" style:family="presentation">
      <style:graphic-properties draw:stroke="none" draw:fill="solid" draw:fill-color="#ffffff"/>
      <style:text-properties style:letter-kerning="true"/>
    </style:style>
    <style:style style:name="Título_20_y_20_texto_20_vertical-backgroundobjects" style:display-name="Título y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exto_20_vertical-notes" style:display-name="Título y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1" style:display-name="Título y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y_20_texto_20_vertical-outline1" style:display-name="Título y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texto_20_vertical-outline2" style:display-name="Título y texto vertical-outline2" style:family="presentation" style:parent-style-name="Título_20_y_20_text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texto_20_vertical-outline3" style:display-name="Título y texto vertical-outline3" style:family="presentation" style:parent-style-name="Título_20_y_20_text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texto_20_vertical-outline4" style:display-name="Título y texto vertical-outline4" style:family="presentation" style:parent-style-name="Título_20_y_20_text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texto_20_vertical-outline5" style:display-name="Título y texto vertical-outline5" style:family="presentation" style:parent-style-name="Título_20_y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6" style:display-name="Título y texto vertical-outline6" style:family="presentation" style:parent-style-name="Título_20_y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7" style:display-name="Título y texto vertical-outline7" style:family="presentation" style:parent-style-name="Título_20_y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8" style:display-name="Título y texto vertical-outline8" style:family="presentation" style:parent-style-name="Título_20_y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9" style:display-name="Título y texto vertical-outline9" style:family="presentation" style:parent-style-name="Título_20_y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y_20_texto_20_vertical-subtitle" style:display-name="Título y texto vertical-subtitle" style:family="presentation">
      <style:graphic-properties draw:stroke="none" draw:fill="none" draw:textarea-vertical-align="middle">
        <text:list-style style:name="Título_20_y_20_texto_20_vertical-subtitle" style:display-name="Título y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title" style:display-name="Título y texto vertical-title" style:family="presentation">
      <style:graphic-properties draw:stroke="none" draw:fill="none" draw:textarea-vertical-align="middle" style:writing-mode="lr-tb">
        <text:list-style style:name="Título_20_y_20_texto_20_vertical-title" style:display-name="Título y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vertical_20_y_20_texto-background" style:display-name="Título vertical y texto-background" style:family="presentation">
      <style:graphic-properties draw:stroke="none" draw:fill="solid" draw:fill-color="#ffffff"/>
      <style:text-properties style:letter-kerning="true"/>
    </style:style>
    <style:style style:name="Título_20_vertical_20_y_20_texto-backgroundobjects" style:display-name="Título vertical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y_20_texto-notes" style:display-name="Título vertical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1" style:display-name="Título vertical y texto-outline1" style:family="presentation">
      <style:graphic-properties draw:stroke="none" draw:fill="none" draw:auto-grow-height="false" draw:fit-to-size="false" style:shrink-to-fit="true" style:writing-mode="lr-tb">
        <text:list-style style:name="Título_20_vertical_20_y_20_texto-outline1" style:display-name="Título vertical y 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vertical_20_y_20_texto-outline2" style:display-name="Título vertical y texto-outline2" style:family="presentation" style:parent-style-name="Título_20_vertical_20_y_20_text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vertical_20_y_20_texto-outline3" style:display-name="Título vertical y texto-outline3" style:family="presentation" style:parent-style-name="Título_20_vertical_20_y_20_text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vertical_20_y_20_texto-outline4" style:display-name="Título vertical y texto-outline4" style:family="presentation" style:parent-style-name="Título_20_vertical_20_y_20_text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vertical_20_y_20_texto-outline5" style:display-name="Título vertical y texto-outline5" style:family="presentation" style:parent-style-name="Título_20_vertical_20_y_20_texto-outline4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6" style:display-name="Título vertical y texto-outline6" style:family="presentation" style:parent-style-name="Título_20_vertical_20_y_20_texto-outline5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7" style:display-name="Título vertical y texto-outline7" style:family="presentation" style:parent-style-name="Título_20_vertical_20_y_20_texto-outline6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8" style:display-name="Título vertical y texto-outline8" style:family="presentation" style:parent-style-name="Título_20_vertical_20_y_20_texto-outline7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9" style:display-name="Título vertical y texto-outline9" style:family="presentation" style:parent-style-name="Título_20_vertical_20_y_20_texto-outline8">
      <style:paragraph-properties fo:margin-top="0.1cm" fo:margin-bottom="0cm"/>
      <style:text-properties fo:font-size="20pt" style:font-size-asian="20pt" style:font-size-complex="20pt"/>
    </style:style>
    <style:style style:name="Título_20_vertical_20_y_20_texto-subtitle" style:display-name="Título vertical y texto-subtitle" style:family="presentation">
      <style:graphic-properties draw:stroke="none" draw:fill="none" draw:textarea-vertical-align="middle">
        <text:list-style style:name="Título_20_vertical_20_y_20_texto-subtitle" style:display-name="Título vertical y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title" style:display-name="Título vertical y texto-title" style:family="presentation">
      <style:graphic-properties draw:stroke="none" draw:fill="none" draw:textarea-vertical-align="middle" style:writing-mode="lr-tb">
        <text:list-style style:name="Título_20_vertical_20_y_20_texto-title" style:display-name="Título vertical y 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cabezado_20_de_20_sección-background" style:display-name="Encabezado de sección-background" style:family="presentation">
      <style:graphic-properties draw:stroke="none" draw:fill="solid" draw:fill-color="#ffffff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false" style:shrink-to-fit="true" style:writing-mode="lr-tb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cabezado_20_de_20_sección-outline2" style:display-name="Encabezado de sección-outline2" style:family="presentation" style:parent-style-name="Encabezado_20_de_20_secció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cabezado_20_de_20_sección-outline3" style:display-name="Encabezado de sección-outline3" style:family="presentation" style:parent-style-name="Encabezado_20_de_20_secció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cabezado_20_de_20_sección-outline4" style:display-name="Encabezado de sección-outline4" style:family="presentation" style:parent-style-name="Encabezado_20_de_20_secció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cabezado_20_de_20_sección-outline5" style:display-name="Encabezado de sección-outline5" style:family="presentation" style:parent-style-name="Encabezado_20_de_20_sección-outline4">
      <style:paragraph-properties fo:margin-top="0.1cm" fo:margin-bottom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 style:writing-mode="lr-tb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tos-background" style:display-name="Dos objetos-background" style:family="presentation">
      <style:graphic-properties draw:stroke="none" draw:fill="solid" draw:fill-color="#ffffff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 style:writing-mode="lr-tb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os_20_objetos-outline2" style:display-name="Dos objetos-outline2" style:family="presentation" style:parent-style-name="Dos_20_objeto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os_20_objetos-outline3" style:display-name="Dos objetos-outline3" style:family="presentation" style:parent-style-name="Dos_20_objeto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os_20_objetos-outline4" style:display-name="Dos objetos-outline4" style:family="presentation" style:parent-style-name="Dos_20_objeto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 style:writing-mode="lr-tb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ción-background" style:family="presentation">
      <style:graphic-properties draw:stroke="none" draw:fill="solid" draw:fill-color="#ffffff"/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false" style:shrink-to-fit="true" style:writing-mode="lr-tb">
        <text:list-style style:name="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ción-outline2" style:family="presentation" style:parent-style-name="Comparació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ción-outline3" style:family="presentation" style:parent-style-name="Comparació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ción-outline4" style:family="presentation" style:parent-style-name="Comparació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ción-outline5" style:family="presentation" style:parent-style-name="Comparación-outline4">
      <style:paragraph-properties fo:margin-top="0.1cm" fo:margin-bottom="0cm"/>
      <style:text-properties fo:font-size="20pt" style:font-size-asian="20pt" style:font-size-complex="20pt"/>
    </style:style>
    <style:style style:name="Comparación-outline6" style:family="presentation" style:parent-style-name="Comparación-outline5">
      <style:paragraph-properties fo:margin-top="0.1cm" fo:margin-bottom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top="0.1cm" fo:margin-bottom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top="0.1cm" fo:margin-bottom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top="0.1cm" fo:margin-bottom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 style:writing-mode="lr-tb">
        <text:list-style style:name="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el_20_título-background" style:display-name="Solo el título-background" style:family="presentation">
      <style:graphic-properties draw:stroke="none" draw:fill="solid" draw:fill-color="#ffffff"/>
      <style:text-properties style:letter-kerning="true"/>
    </style:style>
    <style:style style:name="Solo_20_el_20_título-backgroundobjects" style:display-name="So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el_20_título-notes" style:display-name="So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el_20_título-outline1" style:display-name="Solo el título-outline1" style:family="presentation">
      <style:graphic-properties draw:stroke="none" draw:fill="none" draw:auto-grow-height="false" draw:fit-to-size="false" style:shrink-to-fit="true" style:writing-mode="lr-tb">
        <text:list-style style:name="Solo_20_el_20_título-outline1" style:display-name="Solo el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lo_20_el_20_título-outline2" style:display-name="Solo el título-outline2" style:family="presentation" style:parent-style-name="Solo_20_el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lo_20_el_20_título-outline3" style:display-name="Solo el título-outline3" style:family="presentation" style:parent-style-name="Solo_20_el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lo_20_el_20_título-outline4" style:display-name="Solo el título-outline4" style:family="presentation" style:parent-style-name="Solo_20_el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lo_20_el_20_título-outline5" style:display-name="Solo el título-outline5" style:family="presentation" style:parent-style-name="Solo_20_el_20_título-outline4">
      <style:paragraph-properties fo:margin-top="0.1cm" fo:margin-bottom="0cm"/>
      <style:text-properties fo:font-size="20pt" style:font-size-asian="20pt" style:font-size-complex="20pt"/>
    </style:style>
    <style:style style:name="Solo_20_el_20_título-outline6" style:display-name="Solo el título-outline6" style:family="presentation" style:parent-style-name="Solo_20_el_20_título-outline5">
      <style:paragraph-properties fo:margin-top="0.1cm" fo:margin-bottom="0cm"/>
      <style:text-properties fo:font-size="20pt" style:font-size-asian="20pt" style:font-size-complex="20pt"/>
    </style:style>
    <style:style style:name="Solo_20_el_20_título-outline7" style:display-name="Solo el título-outline7" style:family="presentation" style:parent-style-name="Solo_20_el_20_título-outline6">
      <style:paragraph-properties fo:margin-top="0.1cm" fo:margin-bottom="0cm"/>
      <style:text-properties fo:font-size="20pt" style:font-size-asian="20pt" style:font-size-complex="20pt"/>
    </style:style>
    <style:style style:name="Solo_20_el_20_título-outline8" style:display-name="Solo el título-outline8" style:family="presentation" style:parent-style-name="Solo_20_el_20_título-outline7">
      <style:paragraph-properties fo:margin-top="0.1cm" fo:margin-bottom="0cm"/>
      <style:text-properties fo:font-size="20pt" style:font-size-asian="20pt" style:font-size-complex="20pt"/>
    </style:style>
    <style:style style:name="Solo_20_el_20_título-outline9" style:display-name="Solo el título-outline9" style:family="presentation" style:parent-style-name="Solo_20_el_20_título-outline8">
      <style:paragraph-properties fo:margin-top="0.1cm" fo:margin-bottom="0cm"/>
      <style:text-properties fo:font-size="20pt" style:font-size-asian="20pt" style:font-size-complex="20pt"/>
    </style:style>
    <style:style style:name="Solo_20_el_20_título-subtitle" style:display-name="Solo el título-subtitle" style:family="presentation">
      <style:graphic-properties draw:stroke="none" draw:fill="none" draw:textarea-vertical-align="middle">
        <text:list-style style:name="Solo_20_el_20_título-subtitle" style:display-name="Solo el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el_20_título-title" style:display-name="Solo el título-title" style:family="presentation">
      <style:graphic-properties draw:stroke="none" draw:fill="none" draw:textarea-vertical-align="middle" style:writing-mode="lr-tb">
        <text:list-style style:name="Solo_20_el_20_título-title" style:display-name="Solo el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ido_20_con_20_título-background" style:display-name="Contenido con título-background" style:family="presentation">
      <style:graphic-properties draw:stroke="none" draw:fill="solid" draw:fill-color="#ffffff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false" style:shrink-to-fit="true" style:writing-mode="lr-tb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nido_20_con_20_título-outline2" style:display-name="Contenido con título-outline2" style:family="presentation" style:parent-style-name="Contenido_20_con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nido_20_con_20_título-outline3" style:display-name="Contenido con título-outline3" style:family="presentation" style:parent-style-name="Contenido_20_con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nido_20_con_20_título-outline4" style:display-name="Contenido con título-outline4" style:family="presentation" style:parent-style-name="Contenido_20_con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 style:writing-mode="lr-tb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n_20_con_20_título-background" style:display-name="Imagen con título-background" style:family="presentation">
      <style:graphic-properties draw:stroke="none" draw:fill="solid" draw:fill-color="#ffffff"/>
      <style:text-properties style:letter-kerning="true"/>
    </style:style>
    <style:style style:name="Imagen_20_con_20_título-backgroundobjects" style:display-name="Imagen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título-notes" style:display-name="Imagen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título-outline1" style:display-name="Imagen con título-outline1" style:family="presentation">
      <style:graphic-properties draw:stroke="none" draw:fill="none" draw:auto-grow-height="false" draw:fit-to-size="false" style:shrink-to-fit="true" style:writing-mode="lr-tb">
        <text:list-style style:name="Imagen_20_con_20_título-outline1" style:display-name="Imagen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n_20_con_20_título-outline2" style:display-name="Imagen con título-outline2" style:family="presentation" style:parent-style-name="Imagen_20_con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n_20_con_20_título-outline3" style:display-name="Imagen con título-outline3" style:family="presentation" style:parent-style-name="Imagen_20_con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n_20_con_20_título-outline4" style:display-name="Imagen con título-outline4" style:family="presentation" style:parent-style-name="Imagen_20_con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n_20_con_20_título-outline5" style:display-name="Imagen con título-outline5" style:family="presentation" style:parent-style-name="Imagen_20_con_20_título-outline4">
      <style:paragraph-properties fo:margin-top="0.1cm" fo:margin-bottom="0cm"/>
      <style:text-properties fo:font-size="20pt" style:font-size-asian="20pt" style:font-size-complex="20pt"/>
    </style:style>
    <style:style style:name="Imagen_20_con_20_título-outline6" style:display-name="Imagen con título-outline6" style:family="presentation" style:parent-style-name="Imagen_20_con_20_título-outline5">
      <style:paragraph-properties fo:margin-top="0.1cm" fo:margin-bottom="0cm"/>
      <style:text-properties fo:font-size="20pt" style:font-size-asian="20pt" style:font-size-complex="20pt"/>
    </style:style>
    <style:style style:name="Imagen_20_con_20_título-outline7" style:display-name="Imagen con título-outline7" style:family="presentation" style:parent-style-name="Imagen_20_con_20_título-outline6">
      <style:paragraph-properties fo:margin-top="0.1cm" fo:margin-bottom="0cm"/>
      <style:text-properties fo:font-size="20pt" style:font-size-asian="20pt" style:font-size-complex="20pt"/>
    </style:style>
    <style:style style:name="Imagen_20_con_20_título-outline8" style:display-name="Imagen con título-outline8" style:family="presentation" style:parent-style-name="Imagen_20_con_20_título-outline7">
      <style:paragraph-properties fo:margin-top="0.1cm" fo:margin-bottom="0cm"/>
      <style:text-properties fo:font-size="20pt" style:font-size-asian="20pt" style:font-size-complex="20pt"/>
    </style:style>
    <style:style style:name="Imagen_20_con_20_título-outline9" style:display-name="Imagen con título-outline9" style:family="presentation" style:parent-style-name="Imagen_20_con_20_título-outline8">
      <style:paragraph-properties fo:margin-top="0.1cm" fo:margin-bottom="0cm"/>
      <style:text-properties fo:font-size="20pt" style:font-size-asian="20pt" style:font-size-complex="20pt"/>
    </style:style>
    <style:style style:name="Imagen_20_con_20_título-subtitle" style:display-name="Imagen con título-subtitle" style:family="presentation">
      <style:graphic-properties draw:stroke="none" draw:fill="none" draw:textarea-vertical-align="middle">
        <text:list-style style:name="Imagen_20_con_20_título-subtitle" style:display-name="Imagen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-title" style:display-name="Imagen con título-title" style:family="presentation">
      <style:graphic-properties draw:stroke="none" draw:fill="none" draw:textarea-vertical-align="middle" style:writing-mode="lr-tb">
        <text:list-style style:name="Imagen_20_con_20_título-title" style:display-name="Imagen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bd582c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4" style:family="graphic" style:parent-style-name="standard">
      <style:graphic-properties draw:stroke="none" svg:stroke-width="0.044cm" svg:stroke-linecap="butt" draw:fill="solid" draw:fill-color="#e48312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solid" svg:stroke-width="0.018cm" svg:stroke-color="#80808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ulo_20_y_20_texto_20_vertica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ulo_20_y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7" style:family="presentation" style:parent-style-name="Título_20_y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y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ulo_20_y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ítulo_20_vertical_20_y_20_texto-title">
      <style:graphic-properties draw:stroke="none" svg:stroke-width="0cm" draw:fill="none" loext:fill-use-slide-background="false" draw:textarea-horizontal-align="left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ítulo_20_vertical_20_y_20_texto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12" style:family="presentation" style:parent-style-name="Título_20_vertical_20_y_20_tex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ítulo_20_vertical_20_y_20_tex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ítulo_20_vertical_20_y_20_tex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7" style:family="presentation" style:parent-style-name="Título_20_y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ulo_20_y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Encabezado_20_de_20_secció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Encabezado_20_de_20_secció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Encabezado_20_de_20_secció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Encabezado_20_de_20_secció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os_20_objeto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os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7" style:family="presentation" style:parent-style-name="Dos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os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os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ció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3" style:family="presentation" style:parent-style-name="Comparació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ció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ció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Solo_20_el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Solo_20_el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Solo_20_el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Solo_20_el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En_20_bl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En_20_bl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En_20_bl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ido_20_con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ido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Contenido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ido_20_con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ido_20_con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Imagen_20_con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n_20_con_20_título-outline1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11.049cm" fo:padding-top="1.27cm" fo:padding-bottom="0.125cm" fo:padding-left="1.27cm" fo:padding-right="0.25cm" fo:wrap-option="wrap" loext:decorative="false"/>
      <style:paragraph-properties style:writing-mode="lr-tb"/>
    </style:style>
    <style:style style:name="Mpr51" style:family="presentation" style:parent-style-name="Imagen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.254cm" fo:padding-right="0.254cm" fo:wrap-option="wrap" loext:decorative="false"/>
      <style:paragraph-properties style:writing-mode="lr-tb"/>
    </style:style>
    <style:style style:name="Mpr52" style:family="presentation" style:parent-style-name="Imagen_20_con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Imagen_20_con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Imagen_20_con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d582c"/>
      <style:paragraph-properties fo:text-align="start"/>
      <style:text-properties fo:font-size="18pt"/>
    </style:style>
    <style:style style:name="MP6" style:family="paragraph">
      <loext:graphic-properties draw:fill="solid" draw:fill-color="#e48312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font-size="80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font-size="4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7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18" style:family="paragraph">
      <style:paragraph-properties fo:margin-left="0cm" fo:margin-right="0cm" fo:margin-top="0.071cm" fo:margin-bottom="0.141cm" fo:line-height="9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2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3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font-size="3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5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2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2pt"/>
    </style:style>
    <style:style style:name="MP29" style:family="paragraph">
      <style:paragraph-properties fo:margin-left="0cm" fo:margin-right="0cm" fo:margin-top="0cm" fo:margin-bottom="0.212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es" fo:country="E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s" fo:country="P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5pt" fo:letter-spacing="normal" fo:language="es" fo:country="PE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8" style:family="text">
      <style:text-properties fo:text-transform="uppercase" fo:color="#637052" loext:opacity="100%" style:text-outline="false" style:text-line-through-style="none" style:text-line-through-type="none" style:text-position="0% 100%" style:font-name="Calibri Light" fo:font-size="24pt" fo:letter-spacing="0.071cm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MT9" style:family="text">
      <style:text-properties fo:text-transform="uppercase" fo:color="#637052" loext:opacity="100%" style:text-outline="false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6pt" fo:letter-spacing="-0.018cm" fo:language="es" fo:country="E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es" fo:country="E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2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Calibri" fo:font-size="10.5pt" fo:letter-spacing="normal" fo:language="es" fo:country="PE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2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OpenSymbol" fo:color="#63705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1">Haga clic para modificar el estilo de título del patrón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texto_20_vertical" style:display-name="Título y texto vertical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5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Haga clic para modificar el estilo de título del patrón</text:span></text:p>
        </draw:text-box>
      </draw:frame>
      <draw:frame draw:name="Vertical Text Placeholder 2" presentation:style-name="Mpr6" draw:text-style-name="MP19" draw:layer="backgroundobjects" svg:width="27.939cm" svg:height="11.175cm" svg:x="3.048cm" svg:y="5.127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Título_20_y_20_texto_20_vertical-title" draw:layer="backgroundobjects" svg:width="0cm" svg:height="0cm" svg:x="0cm" svg:y="2.257cm" presentation:class="page"/>
        <draw:frame presentation:style-name="Título_20_y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vertical_20_y_20_texto" style:display-name="Título vertical y texto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6" draw:layer="backgroundobjects" svg:width="7.302cm" svg:height="15.992cm" svg:x="24.236cm" svg:y="1.152cm" presentation:class="title" presentation:user-transformed="true">
        <draw:text-box>
          <text:p text:style-name="MP15"><text:span text:style-name="MT4">Haga clic para modificar el estilo de título del patrón</text:span></text:p>
        </draw:text-box>
      </draw:frame>
      <draw:frame draw:name="Vertical Text Placeholder 2" presentation:style-name="Mpr11" draw:text-style-name="MP19" draw:layer="backgroundobjects" svg:width="21.483cm" svg:height="15.992cm" svg:x="2.328cm" svg:y="1.152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12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1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Título_20_vertical_20_y_20_texto-title" draw:layer="backgroundobjects" svg:width="0cm" svg:height="0cm" svg:x="0cm" svg:y="2.257cm" presentation:class="page"/>
        <draw:frame presentation:style-name="Título_20_vertical_20_y_20_text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15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Haga clic para modificar el estilo de título del patrón</text:span></text:p>
        </draw:text-box>
      </draw:frame>
      <draw:frame draw:name="Content Placeholder 2" presentation:style-name="Mpr16" draw:text-style-name="MP19" draw:layer="backgroundobjects" svg:width="27.939cm" svg:height="11.175cm" svg:x="3.048cm" svg:y="5.127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17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1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0cm" svg:height="0cm" svg:x="0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1">Haga clic para modificar el estilo de título del patrón</text:span></text:p>
        </draw:text-box>
      </draw:frame>
      <draw:frame draw:name="Text Placeholder 2" presentation:style-name="Mpr21" draw:text-style-name="MP21" draw:layer="backgroundobjects" svg:width="27.939cm" svg:height="3.174cm" svg:x="3.048cm" svg:y="12.37cm" presentation:class="outline" presentation:user-transformed="true">
        <draw:text-box>
          <text:p text:style-name="MP20"><text:span text:style-name="MT8">Haga clic para modificar los estilos de texto del patrón</text:span></text:p>
        </draw:text-box>
      </draw:frame>
      <draw:frame draw:name="Date Placeholder 3" presentation:style-name="Mpr2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22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2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presentation:notes style:page-layout-name="PM0">
        <draw:page-thumbnail presentation:style-name="Encabezado_20_de_20_sección-title" draw:layer="backgroundobjects" svg:width="0cm" svg:height="0cm" svg:x="0cm" svg:y="2.257cm" presentation:class="page"/>
        <draw:frame presentation:style-name="Encabezado_20_de_20_secció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os_20_objetos" style:display-name="Dos objetos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7" presentation:style-name="Mpr25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Haga clic para modificar el estilo de título del patrón</text:span></text:p>
        </draw:text-box>
      </draw:frame>
      <draw:frame draw:name="Content Placeholder 2" presentation:style-name="Mpr26" draw:text-style-name="MP19" draw:layer="backgroundobjects" svg:width="13.715cm" svg:height="11.175cm" svg:x="3.048cm" svg:y="5.127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9" draw:layer="backgroundobjects" svg:width="13.715cm" svg:height="11.175cm" svg:x="17.272cm" svg:y="5.127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5" presentation:style-name="Mpr27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2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Dos_20_objetos-title" draw:layer="backgroundobjects" svg:width="0cm" svg:height="0cm" svg:x="0cm" svg:y="2.257cm" presentation:class="page"/>
        <draw:frame presentation:style-name="Dos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mparación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9" presentation:style-name="Mpr30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Haga clic para modificar el estilo de título del patrón</text:span></text:p>
        </draw:text-box>
      </draw:frame>
      <draw:frame draw:name="Text Placeholder 2" presentation:style-name="Mpr31" draw:text-style-name="MP19" draw:layer="backgroundobjects" svg:width="13.715cm" svg:height="2.044cm" svg:x="3.048cm" svg:y="5.128cm" presentation:class="outline" presentation:user-transformed="true">
        <draw:text-box>
          <text:p text:style-name="MP22"><text:span text:style-name="MT9">Haga clic para modificar los estilos de texto del patrón</text:span></text:p>
        </draw:text-box>
      </draw:frame>
      <draw:frame draw:name="Content Placeholder 3" presentation:style-name="Mpr32" draw:text-style-name="MP19" draw:layer="backgroundobjects" svg:width="13.715cm" svg:height="9.383cm" svg:x="3.048cm" svg:y="7.173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9" draw:layer="backgroundobjects" svg:width="13.715cm" svg:height="2.044cm" svg:x="17.272cm" svg:y="5.128cm" presentation:class="outline" presentation:user-transformed="true">
        <draw:text-box>
          <text:p text:style-name="MP22"><text:span text:style-name="MT9">Haga clic para modificar los estilos de texto del patrón</text:span></text:p>
        </draw:text-box>
      </draw:frame>
      <draw:frame draw:name="Content Placeholder 5" presentation:style-name="Mpr32" draw:text-style-name="MP19" draw:layer="backgroundobjects" svg:width="13.715cm" svg:height="9.383cm" svg:x="17.272cm" svg:y="7.173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7" presentation:style-name="Mpr33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8" presentation:style-name="Mpr33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Comparación-title" draw:layer="backgroundobjects" svg:width="0cm" svg:height="0cm" svg:x="0cm" svg:y="2.257cm" presentation:class="page"/>
        <draw:frame presentation:style-name="Comparació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olo_20_el_20_título" style:display-name="Solo el título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36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Haga clic para modificar el estilo de título del patrón</text:span></text:p>
        </draw:text-box>
      </draw:frame>
      <draw:frame draw:name="Date Placeholder 2" presentation:style-name="Mpr3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3" presentation:style-name="Mpr37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4" presentation:style-name="Mpr3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Solo_20_el_20_título-title" draw:layer="backgroundobjects" svg:width="0cm" svg:height="0cm" svg:x="0cm" svg:y="2.257cm" presentation:class="page"/>
        <draw:frame presentation:style-name="So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n_20_blanco" style:display-name="En blanco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4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40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7" presentation:style-name="Mpr40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8" presentation:style-name="Mpr40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En_20_blanco-title" draw:layer="backgroundobjects" svg:width="0cm" svg:height="0cm" svg:x="0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11.251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0.177cm" svg:height="19.049cm" svg:x="11.22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24" draw:layer="backgroundobjects" svg:width="8.889cm" svg:height="6.349cm" svg:x="1.27cm" svg:y="1.651cm" presentation:class="title" presentation:user-transformed="true">
        <draw:text-box>
          <text:p text:style-name="MP23"><text:span text:style-name="MT10">Haga clic para modificar el estilo de título del patrón</text:span></text:p>
        </draw:text-box>
      </draw:frame>
      <draw:frame draw:name="Content Placeholder 2" presentation:style-name="Mpr44" draw:text-style-name="MP19" draw:layer="backgroundobjects" svg:width="18.033cm" svg:height="14.604cm" svg:x="13.335cm" svg:y="2.032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6" draw:layer="backgroundobjects" svg:width="8.889cm" svg:height="9.385cm" svg:x="1.27cm" svg:y="8.128cm" presentation:class="outline" presentation:user-transformed="true">
        <draw:text-box>
          <text:p text:style-name="MP25"><text:span text:style-name="MT11">Haga clic para modificar los estilos de texto del patrón</text:span></text:p>
        </draw:text-box>
      </draw:frame>
      <draw:frame draw:name="Date Placeholder 4" presentation:style-name="Mpr46" draw:text-style-name="MP11" draw:layer="backgroundobjects" svg:width="7.273cm" svg:height="1.013cm" svg:x="1.293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5" presentation:style-name="Mpr46" draw:text-style-name="MP11" draw:layer="backgroundobjects" svg:width="12.911cm" svg:height="1.013cm" svg:x="13.335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46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12"><text:page-number>&lt;número&gt;</text:page-number></text:span></text:p>
        </draw:text-box>
      </draw:frame>
      <presentation:notes style:page-layout-name="PM0">
        <draw:page-thumbnail presentation:style-name="Contenido_20_con_20_título-title" draw:layer="backgroundobjects" svg:width="0cm" svg:height="0cm" svg:x="0cm" svg:y="2.257cm" presentation:class="page"/>
        <draw:frame presentation:style-name="Contenido_20_con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magen_20_con_20_título" style:display-name="Imagen con título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33.857cm" svg:height="5.291cm" svg:x="0cm" svg:y="13.7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3.6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9" draw:text-style-name="MP24" draw:layer="backgroundobjects" svg:width="28.091cm" svg:height="2.285cm" svg:x="3.048cm" svg:y="14.097cm" presentation:class="title" presentation:user-transformed="true">
        <draw:text-box>
          <text:p text:style-name="MP23"><text:span text:style-name="MT10">Haga clic para modificar el estilo de título del patrón</text:span></text:p>
        </draw:text-box>
      </draw:frame>
      <draw:frame draw:name="Picture Placeholder 2" presentation:style-name="Mpr50" draw:text-style-name="MP28" draw:layer="backgroundobjects" svg:width="33.866cm" svg:height="13.652cm" svg:x="0cm" svg:y="0cm" presentation:class="outline" presentation:user-transformed="true">
        <draw:text-box>
          <text:p text:style-name="MP27"><text:span text:style-name="MT13">Haga clic en el icono para agregar una imagen</text:span></text:p>
        </draw:text-box>
      </draw:frame>
      <draw:frame draw:name="Text Placeholder 3" presentation:style-name="Mpr51" draw:text-style-name="MP26" draw:layer="backgroundobjects" svg:width="28.091cm" svg:height="1.65cm" svg:x="3.048cm" svg:y="16.408cm" presentation:class="outline" presentation:user-transformed="true">
        <draw:text-box>
          <text:p text:style-name="MP29"><text:span text:style-name="MT11">Haga clic para modificar los estilos de texto del patrón</text:span></text:p>
        </draw:text-box>
      </draw:frame>
      <draw:frame draw:name="Date Placeholder 4" presentation:style-name="Mpr5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5" presentation:style-name="Mpr52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5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Imagen_20_con_20_título-title" draw:layer="backgroundobjects" svg:width="0cm" svg:height="0cm" svg:x="0cm" svg:y="2.257cm" presentation:class="page"/>
        <draw:frame presentation:style-name="Imagen_20_con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agnóstico empresarial</dc:title>
    <meta:initial-creator>Sofía mieses</meta:initial-creator>
    <dc:creator>Sofía mieses</dc:creator>
    <meta:editing-cycles>2</meta:editing-cycles>
    <meta:creation-date>2022-09-27T14:15:10</meta:creation-date>
    <dc:date>2023-05-05T16:38:29</dc:date>
    <meta:editing-duration>P1DT3H7M</meta:editing-duration>
    <meta:generator>LibreOffice/24.2.4.2$Linux_X86_64 LibreOffice_project/420$Build-2</meta:generator>
    <meta:document-statistic meta:object-count="227"/>
    <meta:user-defined meta:name="AppVersion">16.0000</meta:user-defined>
    <meta:user-defined meta:name="PresentationFormat">Panorámica</meta:user-defined>
    <meta:user-defined meta:name="Slides" meta:value-type="float">10</meta:user-defined>
    <meta:template xlink:type="simple" xlink:actuate="onRequest" xlink:title="Retrospect" xlink:href=""/>
  </office:meta>
</office:document-meta>
</file>