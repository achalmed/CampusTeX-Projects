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5.034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993cm"/>
    </style:style>
    <style:style style:name="co10" style:family="table-column">
      <style:table-column-properties fo:break-before="auto" style:column-width="2.741cm"/>
    </style:style>
    <style:style style:name="co11" style:family="table-column">
      <style:table-column-properties fo:break-before="auto" style:column-width="1.699cm"/>
    </style:style>
    <style:style style:name="co12" style:family="table-column">
      <style:table-column-properties fo:break-before="auto" style:column-width="4.782cm"/>
    </style:style>
    <style:style style:name="co13" style:family="table-column">
      <style:table-column-properties fo:break-before="auto" style:column-width="1.649cm"/>
    </style:style>
    <style:style style:name="co14" style:family="table-column">
      <style:table-column-properties fo:break-before="auto" style:column-width="1.706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1.538cm"/>
    </style:style>
    <style:style style:name="co17" style:family="table-column">
      <style:table-column-properties fo:break-before="auto" style:column-width="2.097cm"/>
    </style:style>
    <style:style style:name="co18" style:family="table-column">
      <style:table-column-properties fo:break-before="auto" style:column-width="1.762cm"/>
    </style:style>
    <style:style style:name="co19" style:family="table-column">
      <style:table-column-properties fo:break-before="auto" style:column-width="2.852cm"/>
    </style:style>
    <style:style style:name="co20" style:family="table-column">
      <style:table-column-properties fo:break-before="auto" style:column-width="2.489cm"/>
    </style:style>
    <style:style style:name="co21" style:family="table-column">
      <style:table-column-properties fo:break-before="auto" style:column-width="2.574cm"/>
    </style:style>
    <style:style style:name="co22" style:family="table-column">
      <style:table-column-properties fo:break-before="auto" style:column-width="2.461cm"/>
    </style:style>
    <style:style style:name="co23" style:family="table-column">
      <style:table-column-properties fo:break-before="auto" style:column-width="2.545cm"/>
    </style:style>
    <style:style style:name="co24" style:family="table-column">
      <style:table-column-properties fo:break-before="auto" style:column-width="2.824cm"/>
    </style:style>
    <style:style style:name="co25" style:family="table-column">
      <style:table-column-properties fo:break-before="auto" style:column-width="6.152cm"/>
    </style:style>
    <style:style style:name="co26" style:family="table-column">
      <style:table-column-properties fo:break-before="auto" style:column-width="2.517cm"/>
    </style:style>
    <style:style style:name="co27" style:family="table-column">
      <style:table-column-properties fo:break-before="auto" style:column-width="2.321cm"/>
    </style:style>
    <style:style style:name="co28" style:family="table-column">
      <style:table-column-properties fo:break-before="auto" style:column-width="2.293cm"/>
    </style:style>
    <style:style style:name="co29" style:family="table-column">
      <style:table-column-properties fo:break-before="auto" style:column-width="2.378cm"/>
    </style:style>
    <style:style style:name="co30" style:family="table-column">
      <style:table-column-properties fo:break-before="auto" style:column-width="2.265cm"/>
    </style:style>
    <style:style style:name="co31" style:family="table-column">
      <style:table-column-properties fo:break-before="auto" style:column-width="0.616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2.937cm"/>
    </style:style>
    <style:style style:name="co34" style:family="table-column">
      <style:table-column-properties fo:break-before="auto" style:column-width="5.622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Deprec._20_y_20_VR">
      <style:table-properties table:display="true" style:writing-mode="lr-tb"/>
    </style:style>
    <style:style style:name="ta2" style:family="table" style:master-page-name="PageStyle_5f_planillas">
      <style:table-properties table:display="true" style:writing-mode="lr-tb"/>
    </style:style>
    <style:style style:name="ta3" style:family="table" style:master-page-name="PageStyle_5f_FC_20_Economico">
      <style:table-properties table:display="true" style:writing-mode="lr-tb"/>
    </style:style>
    <style:style style:name="ta4" style:family="table" style:master-page-name="PageStyle_5f_DEUDA">
      <style:table-properties table:display="true" style:writing-mode="lr-tb"/>
    </style:style>
    <style:style style:name="ta5" style:family="table" style:master-page-name="PageStyle_5f_FCD_20_Y_20_FCF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34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19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2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2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c0c0c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9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0" style:family="table-cell" style:parent-style-name="Default" style:data-style-name="N13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1" style:family="table-cell" style:parent-style-name="Default" style:data-style-name="N1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fo:border-bottom="none" fo:background-color="#c0c0c0" style:diagonal-bl-tr="none" style:diagonal-tl-br="none" fo:border-left="1.76pt solid #000000" fo:border-right="none" style:rotation-align="none" fo:border-top="1.76pt solid #000000"/>
    </style:style>
    <style:style style:name="ce43" style:family="table-cell" style:parent-style-name="Default">
      <style:table-cell-properties fo:border-bottom="1.76pt solid #000000" fo:background-color="#c0c0c0" style:diagonal-bl-tr="none" style:diagonal-tl-br="none" fo:border-left="1.76pt solid #000000" fo:border-right="none" style:rotation-align="none" fo:border-top="none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4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134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2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5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54" style:family="table-cell" style:parent-style-name="Default" style:data-style-name="N13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34">
      <style:table-cell-properties fo:border-bottom="1.76pt solid #000000" fo:background-color="#c0c0c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none" fo:background-color="#c0c0c0" style:diagonal-bl-tr="none" style:diagonal-tl-br="none" fo:border-left="none" fo:border-right="none" style:rotation-align="none" fo:border-top="1.76pt solid #000000"/>
    </style:style>
    <style:style style:name="ce57" style:family="table-cell" style:parent-style-name="Default">
      <style:table-cell-properties fo:border-bottom="1.76pt solid #000000" fo:background-color="#c0c0c0" style:diagonal-bl-tr="none" style:diagonal-tl-br="none" fo:border-left="none" fo:border-right="none" style:rotation-align="none" fo:border-top="none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6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61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3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64" style:family="table-cell" style:parent-style-name="Default" style:data-style-name="N139">
      <style:table-cell-properties style:diagonal-bl-tr="none" style:diagonal-tl-br="none" fo:border="0.74pt solid #000000" style:rotation-align="none"/>
    </style:style>
    <style:style style:name="ce65" style:family="table-cell" style:parent-style-name="Default" style:data-style-name="N3">
      <style:table-cell-properties style:rotation-align="none"/>
    </style:style>
    <style:style style:name="ce66" style:family="table-cell" style:parent-style-name="Default">
      <style:table-cell-properties fo:border-bottom="none" fo:background-color="#c0c0c0" style:diagonal-bl-tr="none" style:diagonal-tl-br="none" fo:border-left="0.74pt solid #000000" fo:border-right="1.76pt solid #000000" style:rotation-align="none" fo:border-top="1.76pt solid #000000"/>
    </style:style>
    <style:style style:name="ce67" style:family="table-cell" style:parent-style-name="Default">
      <style:table-cell-properties fo:border-bottom="1.76pt solid #000000" fo:background-color="#c0c0c0" style:diagonal-bl-tr="none" style:diagonal-tl-br="none" fo:border-left="0.74pt solid #000000" fo:border-right="1.76pt solid #000000" style:rotation-align="none" fo:border-top="none"/>
    </style:style>
    <style:style style:name="ce68" style:family="table-cell" style:parent-style-name="Default" style:data-style-name="N3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69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34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71" style:family="table-cell" style:parent-style-name="Default" style:data-style-name="N3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" style:family="table-cell" style:parent-style-name="Default" style:data-style-name="N134">
      <style:table-cell-properties style:rotation-align="none"/>
    </style:style>
    <style:style style:name="ce7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8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81" style:family="table-cell" style:parent-style-name="Default" style:data-style-name="N10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82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83" style:family="table-cell" style:parent-style-name="Default" style:data-style-name="N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84" style:family="table-cell" style:parent-style-name="Default" style:data-style-name="N134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85" style:family="table-cell" style:parent-style-name="Default" style:data-style-name="N134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86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8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 style:data-style-name="N134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92" style:family="table-cell" style:parent-style-name="Default" style:data-style-name="N134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 style:data-style-name="N1">
      <style:table-cell-properties fo:border-bottom="1.76pt solid #000000" fo:background-color="#c0c0c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</style:style>
    <style:style style:name="ce102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 style:data-style-name="N134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 style:data-style-name="N137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">
      <style:table-cell-properties style:rotation-align="none"/>
    </style:style>
    <style:style style:name="ce108" style:family="table-cell" style:parent-style-name="Default" style:data-style-name="N138">
      <style:table-cell-properties style:diagonal-bl-tr="none" style:diagonal-tl-br="none" fo:border="0.74pt solid #000000" style:rotation-align="none"/>
    </style:style>
    <style:style style:name="ce109" style:family="table-cell" style:parent-style-name="Default" style:data-style-name="N13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138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111" style:family="table-cell" style:parent-style-name="Default" style:data-style-name="N139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 style:data-style-name="N138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115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">
      <style:table-cell-properties fo:background-color="#ffffff" style:rotation-align="none">
        <loext:background-complex-color loext:theme-type="light1" loext:color-type="theme"/>
      </style:table-cell-properties>
    </style:style>
    <style:style style:name="ce120" style:family="table-cell" style:parent-style-name="Excel_20_Built-in_20_Percent" style:data-style-name="N1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Percent" style:data-style-name="N135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 style:data-style-name="N11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 style:data-style-name="N136">
      <style:table-cell-properties fo:background-color="#ffffff" style:rotation-align="none">
        <loext:background-complex-color loext:theme-type="light1" loext:color-type="theme"/>
      </style:table-cell-properties>
    </style:style>
    <style:style style:name="ce125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6" style:family="table-cell" style:parent-style-name="Default" style:data-style-name="N1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7" style:family="table-cell" style:parent-style-name="Default" style:data-style-name="N1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30" style:family="table-cell" style:parent-style-name="Default" style:data-style-name="N136">
      <style:table-cell-properties style:diagonal-bl-tr="none" style:diagonal-tl-br="none" fo:border="0.74pt solid #000000" style:rotation-align="none"/>
    </style:style>
    <style:style style:name="ce131" style:family="table-cell" style:parent-style-name="Default">
      <style:table-cell-properties fo:border-bottom="0.74pt solid #000000" fo:background-color="#40404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dark1" loext:color-type="theme">
          <loext:transformation loext:type="lummod" loext:value="7500"/>
          <loext:transformation loext:type="lumoff" loext:value="24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32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order-bottom="0.74pt solid #000000" fo:background-color="#bfbfb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fo:border-bottom="1.76pt solid #000000" fo:background-color="#bfbfb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0.74pt solid #000000" fo:background-color="#40404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dark1" loext:color-type="theme">
          <loext:transformation loext:type="lummod" loext:value="7500"/>
          <loext:transformation loext:type="lumoff" loext:value="24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37" style:family="table-cell" style:parent-style-name="Default" style:data-style-name="N1">
      <style:table-cell-properties fo:background-color="#bfbfbf" style:diagonal-bl-tr="none" style:diagonal-tl-br="none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 style:data-style-name="N134">
      <style:table-cell-properties fo:border-bottom="1.76pt solid #000000" fo:background-color="#bfbfbf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fo:border-bottom="0.74pt solid #000000" fo:background-color="#40404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dark1" loext:color-type="theme">
          <loext:transformation loext:type="lummod" loext:value="7500"/>
          <loext:transformation loext:type="lumoff" loext:value="24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40" style:family="table-cell" style:parent-style-name="Default" style:data-style-name="N134">
      <style:table-cell-properties fo:border-bottom="0.74pt solid #000000" fo:background-color="#d9d9d9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 style:data-style-name="N1">
      <style:table-cell-properties fo:border-bottom="0.74pt solid #000000" fo:background-color="#bfbfb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 style:data-style-name="N134">
      <style:table-cell-properties fo:border-bottom="1.76pt solid #000000" fo:background-color="#bfbfb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783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P1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pitch-complex="variable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prec. y V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" table:number-columns-repeated="245" table:default-cell-style-name="Default"/>
        <table:table-column table:style-name="co11" table:number-columns-repeated="16128" table:default-cell-style-name="Default"/>
        <table:table-row table:style-name="ro1">
          <table:table-cell/>
          <table:table-cell table:style-name="ce1" office:value-type="string" calcext:value-type="string" table:number-columns-spanned="10" table:number-rows-spanned="1">
            <text:p>DEPRECIACIÓN Y VALOR DE RECUPERO</text:p>
          </table:table-cell>
          <table:covered-table-cell table:number-columns-repeated="9" table:style-name="ce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2" office:value-type="string" calcext:value-type="string">
            <text:p>Deprec. Anual</text:p>
          </table:table-cell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Activo fijo</text:p>
          </table:table-cell>
          <table:table-cell table:style-name="ce2" office:value-type="string" calcext:value-type="string">
            <text:p>Valor Compra</text:p>
          </table:table-cell>
          <table:table-cell table:style-name="ce2" office:value-type="string" calcext:value-type="string">
            <text:p>Vida util</text:p>
          </table:table-cell>
          <table:table-cell table:style-name="ce2" office:value-type="string" calcext:value-type="string">
            <text:p>Tasa</text:p>
          </table:table-cell>
          <table:table-cell table:style-name="ce13" office:value-type="string" calcext:value-type="string">
            <text:p>Año 1-6</text:p>
          </table:table-cell>
          <table:table-cell table:style-name="ce13" office:value-type="string" calcext:value-type="string">
            <text:p>Año 7y8</text:p>
          </table:table-cell>
          <table:table-cell table:style-name="ce2" office:value-type="string" calcext:value-type="string">
            <text:p>Dep. Acum.</text:p>
          </table:table-cell>
          <table:table-cell table:style-name="ce2" office:value-type="string" calcext:value-type="string">
            <text:p>Valor comercial</text:p>
          </table:table-cell>
          <table:table-cell table:style-name="ce2" office:value-type="string" calcext:value-type="string">
            <text:p>Valor en libros</text:p>
          </table:table-cell>
          <table:table-cell table:style-name="ce2" office:value-type="string" calcext:value-type="string">
            <text:p>Utilidad/pérdida</text:p>
          </table:table-cell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Infraestructura</text:p>
          </table:table-cell>
          <table:table-cell table:style-name="ce7" office:value-type="float" office:value="3500000" calcext:value-type="float">
            <text:p>3500000</text:p>
          </table:table-cell>
          <table:table-cell table:style-name="ce9" office:value-type="float" office:value="20" calcext:value-type="float">
            <text:p><text:s/>20 </text:p>
          </table:table-cell>
          <table:table-cell table:style-name="ce11" table:formula="of:=1/20" office:value-type="float" office:value="0.05" calcext:value-type="float">
            <text:p>0.05</text:p>
          </table:table-cell>
          <table:table-cell table:style-name="ce11" table:formula="of:=[.C5]*[.E5]" office:value-type="float" office:value="175000" calcext:value-type="float">
            <text:p>175000</text:p>
          </table:table-cell>
          <table:table-cell table:style-name="ce11" table:formula="of:=[.C5]*[.E5]" office:value-type="float" office:value="175000" calcext:value-type="float">
            <text:p>175000</text:p>
          </table:table-cell>
          <table:table-cell table:style-name="ce11" table:formula="of:=[.G5]*8" office:value-type="float" office:value="1400000" calcext:value-type="float">
            <text:p>1400000</text:p>
          </table:table-cell>
          <table:table-cell table:style-name="ce11" table:formula="of:=[.C5]*0.35" office:value-type="float" office:value="1225000" calcext:value-type="float">
            <text:p>1225000</text:p>
          </table:table-cell>
          <table:table-cell table:style-name="ce11" table:formula="of:=[.C5]-[.H5]" office:value-type="float" office:value="2100000" calcext:value-type="float">
            <text:p>2100000</text:p>
          </table:table-cell>
          <table:table-cell table:style-name="ce11" table:formula="of:=[.I5]-[.J5]" office:value-type="float" office:value="-875000" calcext:value-type="float">
            <text:p>-875000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string" calcext:value-type="string">
            <text:p><text:s/>Líneas de prod. Antigua</text:p>
          </table:table-cell>
          <table:table-cell table:style-name="ce7" office:value-type="float" office:value="1600000" calcext:value-type="float">
            <text:p>1600000</text:p>
          </table:table-cell>
          <table:table-cell table:style-name="ce10" office:value-type="float" office:value="10" calcext:value-type="float">
            <text:p><text:s/>10 </text:p>
          </table:table-cell>
          <table:table-cell table:style-name="ce11" table:formula="of:=1/10" office:value-type="float" office:value="0.1" calcext:value-type="float">
            <text:p>0.1</text:p>
          </table:table-cell>
          <table:table-cell table:style-name="ce11" table:formula="of:=[.C6]*[.E6]" office:value-type="float" office:value="160000" calcext:value-type="float">
            <text:p>160000</text:p>
          </table:table-cell>
          <table:table-cell table:style-name="ce11" table:formula="of:=[.C6]*[.E6]" office:value-type="float" office:value="160000" calcext:value-type="float">
            <text:p>160000</text:p>
          </table:table-cell>
          <table:table-cell table:style-name="ce11" table:formula="of:=[.G6]*8" office:value-type="float" office:value="1280000" calcext:value-type="float">
            <text:p>1280000</text:p>
          </table:table-cell>
          <table:table-cell table:style-name="ce11" table:formula="of:=[.C6]*0.35" office:value-type="float" office:value="560000" calcext:value-type="float">
            <text:p>560000</text:p>
          </table:table-cell>
          <table:table-cell table:style-name="ce11" table:formula="of:=[.C6]-[.H6]" office:value-type="float" office:value="320000" calcext:value-type="float">
            <text:p>320000</text:p>
          </table:table-cell>
          <table:table-cell table:style-name="ce11" table:formula="of:=[.I6]-[.J6]" office:value-type="float" office:value="240000" calcext:value-type="float">
            <text:p>240000</text:p>
          </table:table-cell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Línea de prod. Nueva</text:p>
          </table:table-cell>
          <table:table-cell table:style-name="ce7" office:value-type="float" office:value="800000" calcext:value-type="float">
            <text:p>800000</text:p>
          </table:table-cell>
          <table:table-cell table:style-name="ce10" office:value-type="float" office:value="10" calcext:value-type="float">
            <text:p><text:s/>10 </text:p>
          </table:table-cell>
          <table:table-cell table:style-name="ce11" table:formula="of:=1/10" office:value-type="float" office:value="0.1" calcext:value-type="float">
            <text:p>0.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7]*[.E7]" office:value-type="float" office:value="80000" calcext:value-type="float">
            <text:p>80000</text:p>
          </table:table-cell>
          <table:table-cell table:style-name="ce11" table:formula="of:=[.G7]*2" office:value-type="float" office:value="160000" calcext:value-type="float">
            <text:p>160000</text:p>
          </table:table-cell>
          <table:table-cell table:style-name="ce11" table:formula="of:=[.C7]*0.35" office:value-type="float" office:value="280000" calcext:value-type="float">
            <text:p>280000</text:p>
          </table:table-cell>
          <table:table-cell table:style-name="ce11" table:formula="of:=[.C7]-[.H7]" office:value-type="float" office:value="640000" calcext:value-type="float">
            <text:p>640000</text:p>
          </table:table-cell>
          <table:table-cell table:style-name="ce11" table:formula="of:=[.I7]-[.J7]" office:value-type="float" office:value="-360000" calcext:value-type="float">
            <text:p>-360000</text:p>
          </table:table-cell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7" table:formula="of:=[.C5]+[.C6]" office:value-type="float" office:value="5100000" calcext:value-type="float">
            <text:p>5100000</text:p>
          </table:table-cell>
          <table:table-cell table:style-name="ce11" table:number-columns-repeated="2"/>
          <table:table-cell table:style-name="ce11" table:formula="of:=[.F5]+[.F6]" office:value-type="float" office:value="335000" calcext:value-type="float">
            <text:p>335000</text:p>
          </table:table-cell>
          <table:table-cell table:style-name="ce11" table:formula="of:=[.G5]+[.G6]+[.G7]" office:value-type="float" office:value="415000" calcext:value-type="float">
            <text:p>415000</text:p>
          </table:table-cell>
          <table:table-cell table:style-name="ce14" table:formula="of:=[.H5]+[.H6]+[.H7]" office:value-type="float" office:value="2840000" calcext:value-type="float">
            <text:p>2840000</text:p>
          </table:table-cell>
          <table:table-cell table:style-name="ce11" table:formula="of:=[.I5]+[.I6]+[.I7]" office:value-type="float" office:value="2065000" calcext:value-type="float">
            <text:p>2065000</text:p>
          </table:table-cell>
          <table:table-cell table:style-name="ce11" table:formula="of:=[.J5]+[.J6]+[.J7]" office:value-type="float" office:value="3060000" calcext:value-type="float">
            <text:p>3060000</text:p>
          </table:table-cell>
          <table:table-cell table:style-name="ce14" table:formula="of:=[.K5]+[.K6]+[.K7]" office:value-type="float" office:value="-995000" calcext:value-type="float">
            <text:p>-995000</text:p>
          </table:table-cell>
          <table:table-cell office:value-type="string" calcext:value-type="string">
            <text:p>perdida</text:p>
          </table:table-cell>
          <table:table-cell office:value-type="string" calcext:value-type="string">
            <text:p>Escudo Fisc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calcext:value-type="string">
            <text:p>VALOR RECUPERO</text:p>
          </table:table-cell>
          <table:table-cell table:number-columns-repeated="1637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"/>
          <table:table-cell table:style-name="ce8"/>
          <table:table-cell table:number-columns-repeated="16381"/>
        </table:table-row>
      </table:table>
      <table:table table:name="planillas" table:style-name="ta2">
        <table:table-column table:style-name="co1" table:default-cell-style-name="Default"/>
        <table:table-column table:style-name="co12" table:default-cell-style-name="ce11"/>
        <table:table-column table:style-name="co13" table:default-cell-style-name="ce1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" table:default-cell-style-name="ce7"/>
        <table:table-column table:style-name="co17" table:default-cell-style-name="ce7"/>
        <table:table-column table:style-name="co18" table:default-cell-style-name="ce7"/>
        <table:table-column table:style-name="co1" table:number-columns-repeated="247" table:default-cell-style-name="Default"/>
        <table:table-column table:style-name="co11" table:number-columns-repeated="16128" table:default-cell-style-name="Default"/>
        <table:table-row table:style-name="ro1">
          <table:table-cell/>
          <table:table-cell table:style-name="ce1" office:value-type="string" calcext:value-type="string" table:number-columns-spanned="8" table:number-rows-spanned="1">
            <text:p>PLANILLA DE REMUNERACIONES EN REGIMEN LABORAL GENERAL</text:p>
          </table:table-cell>
          <table:covered-table-cell table:number-columns-repeated="7" table:style-name="ce6"/>
          <table:table-cell table:number-columns-repeated="16375"/>
        </table:table-row>
        <table:table-row table:style-name="ro1">
          <table:table-cell/>
          <table:table-cell table:style-name="Default" table:number-columns-repeated="8"/>
          <table:table-cell table:number-columns-repeated="16375"/>
        </table:table-row>
        <table:table-row table:style-name="ro1">
          <table:table-cell/>
          <table:table-cell table:style-name="ce15" office:value-type="string" calcext:value-type="string">
            <text:p>PUESTO</text:p>
          </table:table-cell>
          <table:table-cell table:style-name="ce15" office:value-type="string" calcext:value-type="string">
            <text:p>MES</text:p>
          </table:table-cell>
          <table:table-cell table:style-name="ce15" office:value-type="string" calcext:value-type="string">
            <text:p>AÑO</text:p>
          </table:table-cell>
          <table:table-cell table:style-name="ce15" office:value-type="string" calcext:value-type="string">
            <text:p>BENEF. SOC.</text:p>
          </table:table-cell>
          <table:table-cell table:style-name="ce15" office:value-type="string" calcext:value-type="string">
            <text:p>CTS</text:p>
          </table:table-cell>
          <table:table-cell table:style-name="ce15" office:value-type="string" calcext:value-type="string">
            <text:p>SUB TOTAL </text:p>
          </table:table-cell>
          <table:table-cell table:style-name="ce15" office:value-type="string" calcext:value-type="string">
            <text:p>ESSALUD</text:p>
          </table:table-cell>
          <table:table-cell table:style-name="ce15" office:value-type="string" calcext:value-type="string">
            <text:p>TOTAL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erente general</text:p>
          </table:table-cell>
          <table:table-cell office:value-type="float" office:value="8000" calcext:value-type="float">
            <text:p>8,000</text:p>
          </table:table-cell>
          <table:table-cell table:formula="of:=[.C4]*12" office:value-type="float" office:value="96000" calcext:value-type="float">
            <text:p>96000</text:p>
          </table:table-cell>
          <table:table-cell table:formula="of:=[.C4]*2" office:value-type="float" office:value="16000" calcext:value-type="float">
            <text:p>16000</text:p>
          </table:table-cell>
          <table:table-cell table:formula="of:=[.C4]*1" office:value-type="float" office:value="8000" calcext:value-type="float">
            <text:p>8000</text:p>
          </table:table-cell>
          <table:table-cell table:formula="of:=[.D4]+[.E4]+[.F4]" office:value-type="float" office:value="120000" calcext:value-type="float">
            <text:p>120000</text:p>
          </table:table-cell>
          <table:table-cell table:formula="of:=[.G4]*0.09" office:value-type="float" office:value="10800" calcext:value-type="float">
            <text:p>10800</text:p>
          </table:table-cell>
          <table:table-cell table:formula="of:=[.G4]+[.H4]" office:value-type="float" office:value="130800" calcext:value-type="float">
            <text:p>1308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erente de marketing</text:p>
          </table:table-cell>
          <table:table-cell office:value-type="float" office:value="5800" calcext:value-type="float">
            <text:p>5,800</text:p>
          </table:table-cell>
          <table:table-cell table:formula="of:=[.C5]*12" office:value-type="float" office:value="69600" calcext:value-type="float">
            <text:p>69600</text:p>
          </table:table-cell>
          <table:table-cell table:formula="of:=[.C5]*2" office:value-type="float" office:value="11600" calcext:value-type="float">
            <text:p>11600</text:p>
          </table:table-cell>
          <table:table-cell table:formula="of:=[.C5]*1" office:value-type="float" office:value="5800" calcext:value-type="float">
            <text:p>5800</text:p>
          </table:table-cell>
          <table:table-cell table:formula="of:=[.D5]+[.E5]+[.F5]" office:value-type="float" office:value="87000" calcext:value-type="float">
            <text:p>87000</text:p>
          </table:table-cell>
          <table:table-cell table:formula="of:=[.G5]*0.09" office:value-type="float" office:value="7830" calcext:value-type="float">
            <text:p>7830</text:p>
          </table:table-cell>
          <table:table-cell table:formula="of:=[.G5]+[.H5]" office:value-type="float" office:value="94830" calcext:value-type="float">
            <text:p>9483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erente de Adm. y Finanzas</text:p>
          </table:table-cell>
          <table:table-cell office:value-type="float" office:value="6000" calcext:value-type="float">
            <text:p>6,000</text:p>
          </table:table-cell>
          <table:table-cell table:formula="of:=[.C6]*12" office:value-type="float" office:value="72000" calcext:value-type="float">
            <text:p>72000</text:p>
          </table:table-cell>
          <table:table-cell table:formula="of:=[.C6]*2" office:value-type="float" office:value="12000" calcext:value-type="float">
            <text:p>12000</text:p>
          </table:table-cell>
          <table:table-cell table:formula="of:=[.C6]*1" office:value-type="float" office:value="6000" calcext:value-type="float">
            <text:p>6000</text:p>
          </table:table-cell>
          <table:table-cell table:formula="of:=[.D6]+[.E6]+[.F6]" office:value-type="float" office:value="90000" calcext:value-type="float">
            <text:p>90000</text:p>
          </table:table-cell>
          <table:table-cell table:formula="of:=[.G6]*0.09" office:value-type="float" office:value="8100" calcext:value-type="float">
            <text:p>8100</text:p>
          </table:table-cell>
          <table:table-cell table:formula="of:=[.G6]+[.H6]" office:value-type="float" office:value="98100" calcext:value-type="float">
            <text:p>981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erente de producción</text:p>
          </table:table-cell>
          <table:table-cell office:value-type="float" office:value="5500" calcext:value-type="float">
            <text:p>5,500</text:p>
          </table:table-cell>
          <table:table-cell table:formula="of:=[.C7]*12" office:value-type="float" office:value="66000" calcext:value-type="float">
            <text:p>66000</text:p>
          </table:table-cell>
          <table:table-cell table:formula="of:=[.C7]*2" office:value-type="float" office:value="11000" calcext:value-type="float">
            <text:p>11000</text:p>
          </table:table-cell>
          <table:table-cell table:formula="of:=[.C7]*1" office:value-type="float" office:value="5500" calcext:value-type="float">
            <text:p>5500</text:p>
          </table:table-cell>
          <table:table-cell table:formula="of:=[.D7]+[.E7]+[.F7]" office:value-type="float" office:value="82500" calcext:value-type="float">
            <text:p>82500</text:p>
          </table:table-cell>
          <table:table-cell table:formula="of:=[.G7]*0.09" office:value-type="float" office:value="7425" calcext:value-type="float">
            <text:p>7425</text:p>
          </table:table-cell>
          <table:table-cell table:formula="of:=[.G7]+[.H7]" office:value-type="float" office:value="89925" calcext:value-type="float">
            <text:p>89925</text:p>
          </table:table-cell>
          <table:table-cell table:number-columns-repeated="16375"/>
        </table:table-row>
        <table:table-row table:style-name="ro1">
          <table:table-cell/>
          <table:table-cell table:style-name="ce16" office:value-type="string" calcext:value-type="string">
            <text:p>TOTAL</text:p>
          </table:table-cell>
          <table:table-cell table:style-name="ce18" table:formula="of:=SUM([.C4:.C7])" office:value-type="float" office:value="25300" calcext:value-type="float">
            <text:p>25,300</text:p>
          </table:table-cell>
          <table:table-cell table:style-name="ce18" table:formula="of:=SUM([.D4:.D7])" office:value-type="float" office:value="303600" calcext:value-type="float">
            <text:p>303,600</text:p>
          </table:table-cell>
          <table:table-cell table:style-name="ce18" table:formula="of:=SUM([.E4:.E7])" office:value-type="float" office:value="50600" calcext:value-type="float">
            <text:p>50,600</text:p>
          </table:table-cell>
          <table:table-cell table:style-name="ce18" table:formula="of:=SUM([.F4:.F7])" office:value-type="float" office:value="25300" calcext:value-type="float">
            <text:p>25,300</text:p>
          </table:table-cell>
          <table:table-cell table:style-name="ce18" table:formula="of:=SUM([.G4:.G7])" office:value-type="float" office:value="379500" calcext:value-type="float">
            <text:p>379,500</text:p>
          </table:table-cell>
          <table:table-cell table:style-name="ce18" table:formula="of:=SUM([.H4:.H7])" office:value-type="float" office:value="34155" calcext:value-type="float">
            <text:p>34,155</text:p>
          </table:table-cell>
          <table:table-cell table:style-name="ce18" table:formula="of:=SUM([.I4:.I7])" office:value-type="float" office:value="413655" calcext:value-type="float">
            <text:p>413,655</text:p>
          </table:table-cell>
          <table:table-cell table:number-columns-repeated="16375"/>
        </table:table-row>
      </table:table>
      <table:table table:name="FC Economico" table:style-name="ta3"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1" table:number-columns-repeated="234" table:default-cell-style-name="Default"/>
        <table:table-column table:style-name="co11" table:number-columns-repeated="16128" table:default-cell-style-name="Default"/>
        <table:table-row table:style-name="ro1">
          <table:table-cell table:style-name="ce19"/>
          <table:table-cell table:style-name="ce19" office:value-type="string" calcext:value-type="string">
            <text:p>EJERCICIO: Flujo de Caja Económico</text:p>
          </table:table-cell>
          <table:table-cell table:style-name="ce19"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n importante grupo de inversionistas desea determinar la rentablidad de instalarse en el país co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la afamada marca de bebidas Dr. Trago en sus dos versiones: Azul y Roja. Para establecer la acep-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tación del producto, se efectúo un estudio de mercado a través del mercado de prueba. Los resulta-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os fueron los siguientes: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urante el primer año de operación, las ventas, por concepto de conocimiento del producto, alcan-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zarán a 350,000 litros; sin embargo, en una etapa posterior, más bien conocida como adopción 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entre el segundo y cuarto año), se determinó que se podrían vender 280,000 litros, del quinto al 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exto trienta por ciento más y los dos últimos 23% más que el periodo anterior. Por otra parte, se</text:p>
          </table:table-cell>
          <table:table-cell table:number-columns-repeated="16382"/>
        </table:table-row>
        <table:table-row table:style-name="ro1">
          <table:table-cell/>
          <table:table-cell table:style-name="ce12" office:value-type="string" calcext:value-type="string">
            <text:p>definió como estrategia <text:s/>vender la bebida a S/. 40 el litro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l estudio técnico del proyecto determinó que cada línea de producción era capaz de elaborar 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200,000 litros anuales, por lo que, cuando la demanda se incremente por sobre su capacidad, s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eberá instalar una adicional. Para producir un litro de bebida se requería incurrir en los siguiente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ostos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Insumos</text:p>
          </table:table-cell>
          <table:table-cell/>
          <table:table-cell office:value-type="string" calcext:value-type="string">
            <text:p>Costo Unitari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Azúcar</text:p>
          </table:table-cell>
          <table:table-cell/>
          <table:table-cell office:value-type="float" office:value="1.86" calcext:value-type="float">
            <text:p>1.8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Agua</text:p>
          </table:table-cell>
          <table:table-cell/>
          <table:table-cell office:value-type="float" office:value="1.24" calcext:value-type="float">
            <text:p>1.2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Alementos químicos</text:p>
          </table:table-cell>
          <table:table-cell/>
          <table:table-cell office:value-type="float" office:value="3.58" calcext:value-type="float">
            <text:p>3.5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Colorantes</text:p>
          </table:table-cell>
          <table:table-cell/>
          <table:table-cell office:value-type="float" office:value="2.55" calcext:value-type="float">
            <text:p>2.5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Energía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Mano de obra directa</text:p>
          </table:table-cell>
          <table:table-cell/>
          <table:table-cell office:value-type="float" office:value="11.56" calcext:value-type="float">
            <text:p>11.56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ara operar con la marca Dr. Trago será necesario pagar un Royalty anual equivalente a 5% de la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ventas netas para los tres primeros años y a 3% por los restantes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l estudio organizacional determinó que para el correcto desarrollo y administración de la empresa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e encuentra en el régimen laboral y tributario general y será necesario contar con una estructura propuesta por: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9" office:value-type="string" calcext:value-type="string">
            <text:p>Puesto</text:p>
          </table:table-cell>
          <table:table-cell/>
          <table:table-cell table:style-name="ce19" office:value-type="string" calcext:value-type="string">
            <text:p>Remuneración Brut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Gerente general</text:p>
          </table:table-cell>
          <table:table-cell/>
          <table:table-cell table:style-name="ce65" office:value-type="float" office:value="8000" calcext:value-type="float">
            <text:p>8,000</text:p>
          </table:table-cell>
          <table:table-cell office:value-type="string" calcext:value-type="string">
            <text:p>mensual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Gerente de marketing</text:p>
          </table:table-cell>
          <table:table-cell/>
          <table:table-cell table:style-name="ce65" office:value-type="float" office:value="5800" calcext:value-type="float">
            <text:p>5,800</text:p>
          </table:table-cell>
          <table:table-cell office:value-type="string" calcext:value-type="string">
            <text:p>mensual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Gerente de Adm. y Finanzas</text:p>
          </table:table-cell>
          <table:table-cell/>
          <table:table-cell table:style-name="ce65" office:value-type="float" office:value="6000" calcext:value-type="float">
            <text:p>6,000</text:p>
          </table:table-cell>
          <table:table-cell office:value-type="string" calcext:value-type="string">
            <text:p>mensual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Gerente de producción</text:p>
          </table:table-cell>
          <table:table-cell/>
          <table:table-cell table:style-name="ce65" office:value-type="float" office:value="5500" calcext:value-type="float">
            <text:p>5,500</text:p>
          </table:table-cell>
          <table:table-cell office:value-type="string" calcext:value-type="string">
            <text:p>mensual</text:p>
          </table:table-cell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Adicionalmente, se han estimado gastos totales por concepto de administración por S/. 300,000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ensuales, cifra que se mantendrá constante en términos reales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l estudio financiero determinó que desde el momento en que la empresa empiece a producir hasta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la primera venta trasncurrirá un periodo de tres meses, el cual deberá ser considerado como capita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e trabajo sólo en lo que a costos variables se refiere, sin considerar Royalties.</text:p>
          </table:table-cell>
          <table:table-cell table:number-columns-repeated="16382"/>
        </table:table-row>
        <table:table-row table:style-name="ro1">
          <table:table-cell/>
          <table:table-cell table:style-name="ce12" office:value-type="string" calcext:value-type="string">
            <text:p>Para la ejecución del proyecto se requerirá invertir S/.3´500,000 en infraestructura, la que será de-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reciada linealmente en 20 años. Se estima que al final del octavo año de operación se podrá ven-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er a 35% de su valor de adquisición. Para montar la fabrica se requerirá la compra de un terreno</text:p>
          </table:table-cell>
          <table:table-cell table:number-columns-repeated="16382"/>
        </table:table-row>
        <table:table-row table:style-name="ro1">
          <table:table-cell/>
          <table:table-cell table:style-name="ce12" office:value-type="string" calcext:value-type="string">
            <text:p>evaluado en 500,0000, valor que se mantendrá en el tiempo. Para la producción propiamente tal, se</text:p>
          </table:table-cell>
          <table:table-cell table:number-columns-repeated="16382"/>
        </table:table-row>
        <table:table-row table:style-name="ro1">
          <table:table-cell/>
          <table:table-cell table:style-name="ce12" office:value-type="string" calcext:value-type="string">
            <text:p>instalarán en un comienzo dos líneas de producción, cuya tecnología requiere una inversión de S/. 800,000</text:p>
          </table:table-cell>
          <table:table-cell table:number-columns-repeated="16382"/>
        </table:table-row>
        <table:table-row table:style-name="ro1">
          <table:table-cell/>
          <table:table-cell table:style-name="ce12" office:value-type="string" calcext:value-type="string">
            <text:p>cada una y serán depreciadas linealmente a 10 años. Al final del año ocho, toda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las líneas de producción tendrán un valor comercial o de salvamento equivalente a 35% de su valor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e adquisición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>
            <text:p>Los inversionistas lo han elegido a usted para que los asesore en su decisión, para lo cual debe</text:p>
          </table:table-cell>
          <table:table-cell table:number-columns-repeated="16382"/>
        </table:table-row>
        <table:table-row table:style-name="ro1">
          <table:table-cell/>
          <table:table-cell table:style-name="ce12" office:value-type="string" calcext:value-type="string">
            <text:p>considerar que la tasa de impuestos a las utilidades es de 29.5% y el IGV igual a 18%.</text:p>
          </table:table-cell>
          <table:table-cell table:number-columns-repeated="16382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>
            <text:p>SOLUCIO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Inversión Inicial del Proyect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42" office:value-type="string" calcext:value-type="string">
            <text:p>Activos</text:p>
          </table:table-cell>
          <table:table-cell table:style-name="ce56"/>
          <table:table-cell table:style-name="ce66" office:value-type="string" calcext:value-type="string">
            <text:p>Valor de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43"/>
          <table:table-cell table:style-name="ce57"/>
          <table:table-cell table:style-name="ce67" office:value-type="string" calcext:value-type="string">
            <text:p>Compra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44" office:value-type="string" calcext:value-type="string" table:number-columns-spanned="2" table:number-rows-spanned="1">
            <text:p>Infraestrucura</text:p>
          </table:table-cell>
          <table:covered-table-cell table:style-name="ce58"/>
          <table:table-cell table:style-name="ce68" office:value-type="float" office:value="3500000" calcext:value-type="float">
            <text:p>3,500,00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24" office:value-type="string" calcext:value-type="string">
            <text:p>Dos líneas de producción</text:p>
          </table:table-cell>
          <table:table-cell table:style-name="ce11"/>
          <table:table-cell table:style-name="ce69" office:value-type="float" office:value="1600000" calcext:value-type="float">
            <text:p><text:s/>1,600,000 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2" table:number-rows-spanned="1">
            <text:p>Terreno</text:p>
          </table:table-cell>
          <table:covered-table-cell table:style-name="ce59"/>
          <table:table-cell table:style-name="ce69" office:value-type="float" office:value="500000" calcext:value-type="float">
            <text:p><text:s/>500,000 </text:p>
          </table:table-cell>
          <table:table-cell table:style-name="ce76" table:formula="of:=[.E58]+[.E59]+[.E60]" office:value-type="float" office:value="5600000" calcext:value-type="float">
            <text:p><text:s/>5,600,000 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24" office:value-type="string" calcext:value-type="string">
            <text:p>Capital de trabajo</text:p>
          </table:table-cell>
          <table:table-cell table:style-name="ce11"/>
          <table:table-cell table:style-name="ce70" table:formula="of:=[.E73]" office:value-type="float" office:value="1976625" calcext:value-type="float">
            <text:p><text:s/>1,976,625 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2" table:number-rows-spanned="1">
            <text:p>Inversión Inicial</text:p>
          </table:table-cell>
          <table:covered-table-cell table:style-name="ce60"/>
          <table:table-cell table:style-name="ce71" table:formula="of:=SUM([.E58:.E61])" office:value-type="float" office:value="7576625" calcext:value-type="float">
            <text:p>7,576,62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Adicionalmente se sabe que el final de periodo 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e invertirá en una nueva línea de produccón d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200,000 litros para abastecer la demanda de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año 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Para hallar el capital de trabajo se procede así: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Costo / litro</text:p>
          </table:table-cell>
          <table:table-cell/>
          <table:table-cell table:style-name="ce72" table:formula="of:=SUM([.E17:.E22])" office:value-type="float" office:value="22.59" calcext:value-type="float">
            <text:p>22.59</text:p>
          </table:table-cell>
          <table:table-cell office:value-type="string" calcext:value-type="string">
            <text:p>CVU Fijo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Producción primer año</text:p>
          </table:table-cell>
          <table:table-cell/>
          <table:table-cell table:style-name="ce73" office:value-type="float" office:value="350000" calcext:value-type="float">
            <text:p>350,000</text:p>
          </table:table-cell>
          <table:table-cell office:value-type="string" calcext:value-type="string">
            <text:p>litro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osto de producción primer año</text:p>
          </table:table-cell>
          <table:table-cell/>
          <table:table-cell table:style-name="ce74" table:formula="of:=[.E70]*[.E69]" office:value-type="float" office:value="7906500" calcext:value-type="float">
            <text:p><text:s/>7,906,500 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Costo de operación mensual</text:p>
          </table:table-cell>
          <table:table-cell/>
          <table:table-cell table:style-name="ce75" table:formula="of:=[.E71]/12" office:value-type="float" office:value="658875" calcext:value-type="float">
            <text:p><text:s/>658,875 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2" office:value-type="string" calcext:value-type="string">
            <text:p>Capital de trabajo inicial</text:p>
          </table:table-cell>
          <table:table-cell/>
          <table:table-cell table:style-name="ce76" table:formula="of:=[.E72]*3" office:value-type="float" office:value="1976625" calcext:value-type="float">
            <text:p><text:s/>1,976,625 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l capital de trabajo varia de acuerdo con los cambios de producción, en el segundo año se requier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un menor capital de trabajo, por lo que se deberá retirar el capital de trabajo. El cuadro siguiente </text:p>
          </table:table-cell>
          <table:table-cell table:number-columns-repeated="16382"/>
        </table:table-row>
        <table:table-row table:style-name="ro1">
          <table:table-cell/>
          <table:table-cell table:style-name="ce12" office:value-type="string" calcext:value-type="string">
            <text:p>muestra los cambios en el capital de trabajo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>
            <text:p>Momento</text:p>
          </table:table-cell>
          <table:table-cell table:style-name="ce47" office:value-type="string" calcext:value-type="string">
            <text:p>Inversión en ca-</text:p>
          </table:table-cell>
          <table:table-cell table:style-name="ce61" office:value-type="string" calcext:value-type="string">
            <text:p>Capital en </text:p>
          </table:table-cell>
          <table:table-cell table:style-name="ce77" office:value-type="string" calcext:value-type="string">
            <text:p>Cambio en la</text:p>
          </table:table-cell>
          <table:table-cell table:number-columns-repeated="16379"/>
        </table:table-row>
        <table:table-row table:style-name="ro1">
          <table:table-cell/>
          <table:table-cell table:style-name="ce30"/>
          <table:table-cell table:style-name="ce48" office:value-type="string" calcext:value-type="string">
            <text:p>pital de trabajo</text:p>
          </table:table-cell>
          <table:table-cell table:style-name="ce62" office:value-type="string" calcext:value-type="string">
            <text:p>operación</text:p>
          </table:table-cell>
          <table:table-cell table:style-name="ce78" office:value-type="string" calcext:value-type="string">
            <text:p>demanda</text:p>
          </table:table-cell>
          <table:table-cell table:number-columns-repeated="16379"/>
        </table:table-row>
        <table:table-row table:style-name="ro1">
          <table:table-cell/>
          <table:table-cell table:style-name="ce31" office:value-type="string" calcext:value-type="string">
            <text:p>Año 0</text:p>
          </table:table-cell>
          <table:table-cell table:style-name="ce49" table:formula="of:=[.E73]*(-1)" office:value-type="float" office:value="-1976625" calcext:value-type="float">
            <text:p><text:s/>(1,976,625)</text:p>
          </table:table-cell>
          <table:table-cell table:style-name="ce53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style-name="ce32" office:value-type="string" calcext:value-type="string">
            <text:p>Año 1</text:p>
          </table:table-cell>
          <table:table-cell table:style-name="ce10" table:formula="of:=[.D83]-[.D82]" office:value-type="float" office:value="395325" calcext:value-type="float">
            <text:p><text:s/>395,325 </text:p>
          </table:table-cell>
          <table:table-cell table:style-name="ce10" table:formula="of:=[.C81]" office:value-type="float" office:value="-1976625" calcext:value-type="float">
            <text:p><text:s/>(1,976,625)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style-name="ce32" office:value-type="string" calcext:value-type="string">
            <text:p>Año 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[.D82]*(1+[.E83])" office:value-type="float" office:value="-1581300" calcext:value-type="float">
            <text:p><text:s/>(1,581,300)</text:p>
          </table:table-cell>
          <table:table-cell table:style-name="ce81" office:value-type="percentage" office:value="-0.2" calcext:value-type="percentage">
            <text:p>-20 %</text:p>
          </table:table-cell>
          <table:table-cell table:number-columns-repeated="16379"/>
        </table:table-row>
        <table:table-row table:style-name="ro1">
          <table:table-cell/>
          <table:table-cell table:style-name="ce32" office:value-type="string" calcext:value-type="string">
            <text:p>Año 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[.D83]" office:value-type="float" office:value="-1581300" calcext:value-type="float">
            <text:p><text:s/>(1,581,300)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style-name="ce32" office:value-type="string" calcext:value-type="string">
            <text:p>Año 4</text:p>
          </table:table-cell>
          <table:table-cell table:style-name="ce10" table:formula="of:=[.D86]-[.D85]" office:value-type="float" office:value="-474390" calcext:value-type="float">
            <text:p><text:s/>(474,390)</text:p>
          </table:table-cell>
          <table:table-cell table:style-name="ce10" table:formula="of:=[.D84]" office:value-type="float" office:value="-1581300" calcext:value-type="float">
            <text:p><text:s/>(1,581,300)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style-name="ce32" office:value-type="string" calcext:value-type="string">
            <text:p>Año 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[.D85]*(1+[.E86])" office:value-type="float" office:value="-2055690" calcext:value-type="float">
            <text:p><text:s/>(2,055,690)</text:p>
          </table:table-cell>
          <table:table-cell table:style-name="ce81" office:value-type="percentage" office:value="0.3" calcext:value-type="percentage">
            <text:p>30 %</text:p>
          </table:table-cell>
          <table:table-cell table:number-columns-repeated="16379"/>
        </table:table-row>
        <table:table-row table:style-name="ro1">
          <table:table-cell/>
          <table:table-cell table:style-name="ce32" office:value-type="string" calcext:value-type="string">
            <text:p>Año 6</text:p>
          </table:table-cell>
          <table:table-cell table:style-name="ce10" table:formula="of:=[.D88]-[.D87]" office:value-type="float" office:value="-472808.7" calcext:value-type="float">
            <text:p><text:s/>(472,809)</text:p>
          </table:table-cell>
          <table:table-cell table:style-name="ce10" table:formula="of:=[.D86]" office:value-type="float" office:value="-2055690" calcext:value-type="float">
            <text:p><text:s/>(2,055,690)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style-name="ce32" office:value-type="string" calcext:value-type="string">
            <text:p>Año 7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formula="of:=[.D87]*(1+[.E88])" office:value-type="float" office:value="-2528498.7" calcext:value-type="float">
            <text:p><text:s/>(2,528,499)</text:p>
          </table:table-cell>
          <table:table-cell table:style-name="ce81" office:value-type="percentage" office:value="0.23" calcext:value-type="percentage">
            <text:p>23 %</text:p>
          </table:table-cell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Año 8</text:p>
          </table:table-cell>
          <table:table-cell table:style-name="ce50" office:value-type="float" office:value="0" calcext:value-type="float">
            <text:p><text:s/>- <text:s text:c="2"/></text:p>
          </table:table-cell>
          <table:table-cell table:style-name="ce50" table:formula="of:=[.D88]" office:value-type="float" office:value="-2528498.7" calcext:value-type="float">
            <text:p><text:s/>(2,528,499)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ada línea de producción tiene una capacidad máxima de 200,000 litros cada una, al sexto año de opera-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ión deberá adquirirse una adicional, ya que la producción esperada para el año séptimno supera la capa-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idad máxima de las dos iniciales, las que no pueden exceder los 400,000 litros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 table:number-columns-spanned="4" table:number-rows-spanned="1">
            <text:p>Requerimientos de producción en función de la demanda estimada</text:p>
          </table:table-cell>
          <table:covered-table-cell table:number-columns-repeated="3" table:style-name="ce51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>
            <text:p>Momento</text:p>
          </table:table-cell>
          <table:table-cell table:style-name="ce47" office:value-type="string" calcext:value-type="string">
            <text:p>cambios en la</text:p>
          </table:table-cell>
          <table:table-cell table:style-name="ce61" office:value-type="string" calcext:value-type="string">
            <text:p>cambio marginal</text:p>
          </table:table-cell>
          <table:table-cell table:style-name="ce77" office:value-type="string" calcext:value-type="string">
            <text:p>Produccion </text:p>
          </table:table-cell>
          <table:table-cell table:number-columns-repeated="16379"/>
        </table:table-row>
        <table:table-row table:style-name="ro1">
          <table:table-cell/>
          <table:table-cell table:style-name="ce30"/>
          <table:table-cell table:style-name="ce48" office:value-type="string" calcext:value-type="string">
            <text:p>demanda</text:p>
          </table:table-cell>
          <table:table-cell table:style-name="ce62" office:value-type="string" calcext:value-type="string">
            <text:p>en litros</text:p>
          </table:table-cell>
          <table:table-cell table:style-name="ce78" office:value-type="string" calcext:value-type="string">
            <text:p>estimada </text:p>
          </table:table-cell>
          <table:table-cell table:style-name="ce87" office:value-type="string" calcext:value-type="string">
            <text:p>Lineas</text:p>
          </table:table-cell>
          <table:table-cell table:number-columns-repeated="16378"/>
        </table:table-row>
        <table:table-row table:style-name="ro1">
          <table:table-cell/>
          <table:table-cell table:style-name="ce32" office:value-type="string" calcext:value-type="string">
            <text:p>Año 1</text:p>
          </table:table-cell>
          <table:table-cell table:style-name="ce10"/>
          <table:table-cell table:style-name="ce10" office:value-type="float" office:value="0" calcext:value-type="float">
            <text:p><text:s/>- <text:s text:c="2"/></text:p>
          </table:table-cell>
          <table:table-cell table:style-name="ce83" office:value-type="float" office:value="350000" calcext:value-type="float">
            <text:p>350,000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/>
          <table:table-cell table:style-name="ce32" office:value-type="string" calcext:value-type="string">
            <text:p>Año 2</text:p>
          </table:table-cell>
          <table:table-cell table:style-name="ce52" office:value-type="percentage" office:value="-0.2" calcext:value-type="percentage">
            <text:p>-20 %</text:p>
          </table:table-cell>
          <table:table-cell table:style-name="ce10" table:formula="of:=[.E100]-[.E99]" office:value-type="float" office:value="-70000" calcext:value-type="float">
            <text:p><text:s/>(70,000)</text:p>
          </table:table-cell>
          <table:table-cell table:style-name="ce69" table:formula="of:=[.E99]*(1+[.C100])" office:value-type="float" office:value="280000" calcext:value-type="float">
            <text:p><text:s/>280,000 </text:p>
          </table:table-cell>
          <table:table-cell table:style-name="ce88" office:value-type="float" office:value="2" calcext:value-type="float">
            <text:p><text:s/>2.00 </text:p>
          </table:table-cell>
          <table:table-cell/>
          <table:table-cell table:style-name="ce89" table:formula="of:=([.E100]-[.E99])/[.E99]" office:value-type="percentage" office:value="-0.2" calcext:value-type="percentage">
            <text:p>-20 %</text:p>
          </table:table-cell>
          <table:table-cell table:number-columns-repeated="16376"/>
        </table:table-row>
        <table:table-row table:style-name="ro1">
          <table:table-cell/>
          <table:table-cell table:style-name="ce32" office:value-type="string" calcext:value-type="string">
            <text:p>Año 3</text:p>
          </table:table-cell>
          <table:table-cell table:style-name="ce11"/>
          <table:table-cell table:style-name="ce10" office:value-type="float" office:value="0" calcext:value-type="float">
            <text:p><text:s/>- <text:s text:c="2"/></text:p>
          </table:table-cell>
          <table:table-cell table:style-name="ce70" table:formula="of:=[.E100]" office:value-type="float" office:value="280000" calcext:value-type="float">
            <text:p><text:s/>280,000 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/>
          <table:table-cell table:style-name="ce32" office:value-type="string" calcext:value-type="string">
            <text:p>Año 4</text:p>
          </table:table-cell>
          <table:table-cell table:style-name="ce10"/>
          <table:table-cell table:style-name="ce10" office:value-type="float" office:value="0" calcext:value-type="float">
            <text:p><text:s/>- <text:s text:c="2"/></text:p>
          </table:table-cell>
          <table:table-cell table:style-name="ce70" table:formula="of:=[.E101]" office:value-type="float" office:value="280000" calcext:value-type="float">
            <text:p><text:s/>280,000 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/>
          <table:table-cell table:style-name="ce32" office:value-type="string" calcext:value-type="string">
            <text:p>Año 5</text:p>
          </table:table-cell>
          <table:table-cell table:style-name="ce52" office:value-type="percentage" office:value="0.3" calcext:value-type="percentage">
            <text:p>30 %</text:p>
          </table:table-cell>
          <table:table-cell table:style-name="ce10" table:formula="of:=[.E103]-[.E102]" office:value-type="float" office:value="84000" calcext:value-type="float">
            <text:p><text:s/>84,000 </text:p>
          </table:table-cell>
          <table:table-cell table:style-name="ce70" table:formula="of:=[.E102]*(1+[.C103])" office:value-type="float" office:value="364000" calcext:value-type="float">
            <text:p><text:s/>364,000 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/>
          <table:table-cell table:style-name="ce32" office:value-type="string" calcext:value-type="string">
            <text:p>Año 6</text:p>
          </table:table-cell>
          <table:table-cell table:style-name="ce10"/>
          <table:table-cell table:style-name="ce10" office:value-type="float" office:value="0" calcext:value-type="float">
            <text:p><text:s/>- <text:s text:c="2"/></text:p>
          </table:table-cell>
          <table:table-cell table:style-name="ce70" table:formula="of:=[.E103]" office:value-type="float" office:value="364000" calcext:value-type="float">
            <text:p><text:s/>364,000 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/>
          <table:table-cell table:style-name="ce32" office:value-type="string" calcext:value-type="string">
            <text:p>Año 7</text:p>
          </table:table-cell>
          <table:table-cell table:style-name="ce52" office:value-type="percentage" office:value="0.23" calcext:value-type="percentage">
            <text:p>23 %</text:p>
          </table:table-cell>
          <table:table-cell table:style-name="ce9" table:formula="of:=[.E105]-[.E104]" office:value-type="float" office:value="83720" calcext:value-type="float">
            <text:p><text:s/>83,720 </text:p>
          </table:table-cell>
          <table:table-cell table:style-name="ce70" table:formula="of:=[.E104]*(1+[.C105])" office:value-type="float" office:value="447720" calcext:value-type="float">
            <text:p><text:s/>447,720 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/>
          <table:table-cell table:style-name="ce33" office:value-type="string" calcext:value-type="string">
            <text:p>Año 8</text:p>
          </table:table-cell>
          <table:table-cell table:number-columns-repeated="2" table:style-name="ce50" office:value-type="float" office:value="0" calcext:value-type="float">
            <text:p><text:s/>- <text:s text:c="2"/></text:p>
          </table:table-cell>
          <table:table-cell table:style-name="ce84" table:formula="of:=[.E105]" office:value-type="float" office:value="447720" calcext:value-type="float">
            <text:p><text:s/>447,720 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 table:number-columns-spanned="11" table:number-rows-spanned="1">
            <text:p>FLUJO DE CAJA ECONÓMICO <text:s/>FORMATO B</text:p>
          </table:table-cell>
          <table:covered-table-cell table:number-columns-repeated="10" table:style-name="ce20"/>
          <table:table-cell/>
          <table:table-cell table:style-name="ce20" office:value-type="string" calcext:value-type="string" table:number-columns-spanned="10" table:number-rows-spanned="1">
            <text:p>FLUJO DE CAJA ECONÓMICO <text:s/>FORMATO A</text:p>
          </table:table-cell>
          <table:covered-table-cell table:number-columns-repeated="9" table:style-name="ce20"/>
          <table:table-cell table:number-columns-repeated="16362"/>
        </table:table-row>
        <table:table-row table:style-name="ro1">
          <table:table-cell table:style-name="ce21" office:value-type="string" calcext:value-type="string">
            <text:p>RUBRO</text:p>
          </table:table-cell>
          <table:table-cell table:style-name="ce35"/>
          <table:table-cell table:style-name="ce35" office:value-type="string" calcext:value-type="string">
            <text:p>Año 0</text:p>
          </table:table-cell>
          <table:table-cell table:style-name="ce35" office:value-type="string" calcext:value-type="string">
            <text:p>Año 1</text:p>
          </table:table-cell>
          <table:table-cell table:style-name="ce35" office:value-type="string" calcext:value-type="string">
            <text:p>Año 2</text:p>
          </table:table-cell>
          <table:table-cell table:style-name="ce35" office:value-type="string" calcext:value-type="string">
            <text:p>Año 3</text:p>
          </table:table-cell>
          <table:table-cell table:style-name="ce35" office:value-type="string" calcext:value-type="string">
            <text:p>Año 4</text:p>
          </table:table-cell>
          <table:table-cell table:style-name="ce35" office:value-type="string" calcext:value-type="string">
            <text:p>Año 5</text:p>
          </table:table-cell>
          <table:table-cell table:style-name="ce35" office:value-type="string" calcext:value-type="string">
            <text:p>Año 6</text:p>
          </table:table-cell>
          <table:table-cell table:style-name="ce35" office:value-type="string" calcext:value-type="string">
            <text:p>Año 7</text:p>
          </table:table-cell>
          <table:table-cell table:style-name="ce90" office:value-type="string" calcext:value-type="string">
            <text:p>Año 8</text:p>
          </table:table-cell>
          <table:table-cell/>
          <table:table-cell table:style-name="ce94" office:value-type="string" calcext:value-type="string">
            <text:p>RUBRO</text:p>
          </table:table-cell>
          <table:table-cell table:style-name="ce94" office:value-type="string" calcext:value-type="string">
            <text:p>Año 0</text:p>
          </table:table-cell>
          <table:table-cell table:style-name="ce94" office:value-type="string" calcext:value-type="string">
            <text:p>Año 1</text:p>
          </table:table-cell>
          <table:table-cell table:style-name="ce94" office:value-type="string" calcext:value-type="string">
            <text:p>Año 2</text:p>
          </table:table-cell>
          <table:table-cell table:style-name="ce94" office:value-type="string" calcext:value-type="string">
            <text:p>Año 3</text:p>
          </table:table-cell>
          <table:table-cell table:style-name="ce94" office:value-type="string" calcext:value-type="string">
            <text:p>Año 4</text:p>
          </table:table-cell>
          <table:table-cell table:style-name="ce94" office:value-type="string" calcext:value-type="string">
            <text:p>Año 5</text:p>
          </table:table-cell>
          <table:table-cell table:style-name="ce94" office:value-type="string" calcext:value-type="string">
            <text:p>Año 6</text:p>
          </table:table-cell>
          <table:table-cell table:style-name="ce94" office:value-type="string" calcext:value-type="string">
            <text:p>Año 7</text:p>
          </table:table-cell>
          <table:table-cell table:style-name="ce113" office:value-type="string" calcext:value-type="string">
            <text:p>Año 8</text:p>
          </table:table-cell>
          <table:table-cell table:number-columns-repeated="16362"/>
        </table:table-row>
        <table:table-row table:style-name="ro1">
          <table:table-cell table:style-name="ce22" office:value-type="string" calcext:value-type="string">
            <text:p>cantidad producida</text:p>
          </table:table-cell>
          <table:table-cell table:style-name="ce36"/>
          <table:table-cell table:style-name="ce53"/>
          <table:table-cell table:style-name="ce63" table:formula="of:=[.E99]" office:value-type="float" office:value="350000" calcext:value-type="float">
            <text:p>350,000</text:p>
          </table:table-cell>
          <table:table-cell table:style-name="ce85" table:formula="of:=[.E100]" office:value-type="float" office:value="280000" calcext:value-type="float">
            <text:p><text:s/>280,000 </text:p>
          </table:table-cell>
          <table:table-cell table:style-name="ce85" table:formula="of:=[.E101]" office:value-type="float" office:value="280000" calcext:value-type="float">
            <text:p><text:s/>280,000 </text:p>
          </table:table-cell>
          <table:table-cell table:style-name="ce85" table:formula="of:=[.E102]" office:value-type="float" office:value="280000" calcext:value-type="float">
            <text:p><text:s/>280,000 </text:p>
          </table:table-cell>
          <table:table-cell table:style-name="ce85" table:formula="of:=[.E103]" office:value-type="float" office:value="364000" calcext:value-type="float">
            <text:p><text:s/>364,000 </text:p>
          </table:table-cell>
          <table:table-cell table:style-name="ce85" table:formula="of:=[.E104]" office:value-type="float" office:value="364000" calcext:value-type="float">
            <text:p><text:s/>364,000 </text:p>
          </table:table-cell>
          <table:table-cell table:style-name="ce85" table:formula="of:=[.E105]" office:value-type="float" office:value="447720" calcext:value-type="float">
            <text:p><text:s/>447,720 </text:p>
          </table:table-cell>
          <table:table-cell table:style-name="ce91" table:formula="of:=[.E106]" office:value-type="float" office:value="447720" calcext:value-type="float">
            <text:p><text:s/>447,720 </text:p>
          </table:table-cell>
          <table:table-cell/>
          <table:table-cell table:style-name="ce11" office:value-type="string" calcext:value-type="string">
            <text:p>Terreno</text:p>
          </table:table-cell>
          <table:table-cell table:style-name="ce10" table:formula="of:=[.C138]" office:value-type="float" office:value="-500000" calcext:value-type="float">
            <text:p><text:s/>(500,000)</text:p>
          </table:table-cell>
          <table:table-cell table:style-name="ce11" table:number-columns-repeated="8"/>
          <table:table-cell table:number-columns-repeated="16362"/>
        </table:table-row>
        <table:table-row table:style-name="ro1">
          <table:table-cell table:style-name="ce23" office:value-type="string" calcext:value-type="string">
            <text:p>Valor de venta por litro</text:p>
          </table:table-cell>
          <table:table-cell table:style-name="ce11" table:number-columns-repeated="2"/>
          <table:table-cell table:number-columns-repeated="8" table:style-name="ce11" office:value-type="float" office:value="40" calcext:value-type="float">
            <text:p>40</text:p>
          </table:table-cell>
          <table:table-cell/>
          <table:table-cell table:style-name="ce11" office:value-type="string" calcext:value-type="string">
            <text:p>Infraestructura</text:p>
          </table:table-cell>
          <table:table-cell table:style-name="ce10" table:formula="of:=[.C137]" office:value-type="float" office:value="-3500000" calcext:value-type="float">
            <text:p><text:s/>(3,500,000)</text:p>
          </table:table-cell>
          <table:table-cell table:style-name="ce11" table:number-columns-repeated="8"/>
          <table:table-cell table:number-columns-repeated="16362"/>
        </table:table-row>
        <table:table-row table:style-name="ro1">
          <table:table-cell table:style-name="ce24" office:value-type="string" calcext:value-type="string">
            <text:p>Ingreso por venta netas</text:p>
          </table:table-cell>
          <table:table-cell table:style-name="ce37"/>
          <table:table-cell table:style-name="ce11"/>
          <table:table-cell table:style-name="ce9" table:formula="of:=[.D110]*[.D111]" office:value-type="float" office:value="14000000" calcext:value-type="float">
            <text:p><text:s/>14,000,000 </text:p>
          </table:table-cell>
          <table:table-cell table:style-name="ce9" table:formula="of:=[.E110]*[.E111]" office:value-type="float" office:value="11200000" calcext:value-type="float">
            <text:p><text:s/>11,200,000 </text:p>
          </table:table-cell>
          <table:table-cell table:style-name="ce9" table:formula="of:=[.F110]*[.F111]" office:value-type="float" office:value="11200000" calcext:value-type="float">
            <text:p><text:s/>11,200,000 </text:p>
          </table:table-cell>
          <table:table-cell table:style-name="ce9" table:formula="of:=[.G110]*[.G111]" office:value-type="float" office:value="11200000" calcext:value-type="float">
            <text:p><text:s/>11,200,000 </text:p>
          </table:table-cell>
          <table:table-cell table:style-name="ce9" table:formula="of:=[.H110]*[.H111]" office:value-type="float" office:value="14560000" calcext:value-type="float">
            <text:p><text:s/>14,560,000 </text:p>
          </table:table-cell>
          <table:table-cell table:style-name="ce9" table:formula="of:=[.I110]*[.I111]" office:value-type="float" office:value="14560000" calcext:value-type="float">
            <text:p><text:s/>14,560,000 </text:p>
          </table:table-cell>
          <table:table-cell table:style-name="ce9" table:formula="of:=[.J110]*[.J111]" office:value-type="float" office:value="17908800" calcext:value-type="float">
            <text:p><text:s/>17,908,800 </text:p>
          </table:table-cell>
          <table:table-cell table:style-name="ce69" table:formula="of:=[.K110]*[.K111]" office:value-type="float" office:value="17908800" calcext:value-type="float">
            <text:p><text:s/>17,908,800 </text:p>
          </table:table-cell>
          <table:table-cell/>
          <table:table-cell table:style-name="ce3" office:value-type="string" calcext:value-type="string">
            <text:p>Linea de producción</text:p>
          </table:table-cell>
          <table:table-cell table:style-name="ce10" table:formula="of:=[.C139]" office:value-type="float" office:value="-1600000" calcext:value-type="float">
            <text:p><text:s/>(1,600,000)</text:p>
          </table:table-cell>
          <table:table-cell table:style-name="ce11" table:number-columns-repeated="5"/>
          <table:table-cell table:style-name="ce10" table:formula="of:=[.I139]" office:value-type="float" office:value="-800000" calcext:value-type="float">
            <text:p><text:s/>(800,000)</text:p>
          </table:table-cell>
          <table:table-cell table:style-name="ce11" table:number-columns-repeated="2"/>
          <table:table-cell table:number-columns-repeated="16362"/>
        </table:table-row>
        <table:table-row table:style-name="ro1">
          <table:table-cell table:style-name="ce24" office:value-type="string" calcext:value-type="string">
            <text:p>Costos Directos de producción</text:p>
          </table:table-cell>
          <table:table-cell table:style-name="ce11" table:number-columns-repeated="2"/>
          <table:table-cell table:style-name="ce10" table:formula="of:=[.D110]*[.$E$69]*(-1)" office:value-type="float" office:value="-7906500" calcext:value-type="float">
            <office:annotation draw:style-name="gr1" draw:text-style-name="P1" svg:width="3.52cm" svg:height="1.983cm" svg:x="8.295cm" svg:y="51.541cm" draw:caption-point-x="4.391cm" draw:caption-point-y="-1.154cm">
              <dc:creator>Edison Achalma Mendoza</dc:creator>
              <dc:date>2024-07-31T03:27:00</dc:date>
              <text:p>UP:</text:p>
              <text:p><text:span text:style-name="T1"/></text:p>
            </office:annotation>
            <text:p><text:s/>(7,906,500)</text:p>
          </table:table-cell>
          <table:table-cell table:style-name="ce10" table:formula="of:=[.E110]*[.$E$69]*(-1)" office:value-type="float" office:value="-6325200" calcext:value-type="float">
            <text:p><text:s/>(6,325,200)</text:p>
          </table:table-cell>
          <table:table-cell table:style-name="ce10" table:formula="of:=[.F110]*[.$E$69]*(-1)" office:value-type="float" office:value="-6325200" calcext:value-type="float">
            <text:p><text:s/>(6,325,200)</text:p>
          </table:table-cell>
          <table:table-cell table:style-name="ce10" table:formula="of:=[.G110]*[.$E$69]*(-1)" office:value-type="float" office:value="-6325200" calcext:value-type="float">
            <text:p><text:s/>(6,325,200)</text:p>
          </table:table-cell>
          <table:table-cell table:style-name="ce10" table:formula="of:=[.H110]*[.$E$69]*(-1)" office:value-type="float" office:value="-8222760" calcext:value-type="float">
            <text:p><text:s/>(8,222,760)</text:p>
          </table:table-cell>
          <table:table-cell table:style-name="ce10" table:formula="of:=[.I110]*[.$E$69]*(-1)" office:value-type="float" office:value="-8222760" calcext:value-type="float">
            <text:p><text:s/>(8,222,760)</text:p>
          </table:table-cell>
          <table:table-cell table:style-name="ce10" table:formula="of:=[.J110]*[.$E$69]*(-1)" office:value-type="float" office:value="-10113994.8" calcext:value-type="float">
            <text:p><text:s/>(10,113,995)</text:p>
          </table:table-cell>
          <table:table-cell table:style-name="ce70" table:formula="of:=[.K110]*[.$E$69]*(-1)" office:value-type="float" office:value="-10113994.8" calcext:value-type="float">
            <text:p><text:s/>(10,113,995)</text:p>
          </table:table-cell>
          <table:table-cell/>
          <table:table-cell table:style-name="ce95" office:value-type="string" calcext:value-type="string">
            <text:p>Recupero de terreno</text:p>
          </table:table-cell>
          <table:table-cell table:style-name="ce11" table:number-columns-repeated="8"/>
          <table:table-cell table:style-name="ce10" table:formula="of:=-[.N110]" office:value-type="float" office:value="500000" calcext:value-type="float">
            <text:p><text:s/>500,000 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Royalty</text:p>
          </table:table-cell>
          <table:table-cell table:style-name="ce11" table:number-columns-repeated="2"/>
          <table:table-cell table:style-name="ce10" table:formula="of:=[.D112]*0.05*(-1)" office:value-type="float" office:value="-700000" calcext:value-type="float">
            <text:p><text:s/>(700,000)</text:p>
          </table:table-cell>
          <table:table-cell table:style-name="ce10" table:formula="of:=[.E112]*0.05*(-1)" office:value-type="float" office:value="-560000" calcext:value-type="float">
            <text:p><text:s/>(560,000)</text:p>
          </table:table-cell>
          <table:table-cell table:style-name="ce10" table:formula="of:=[.F112]*0.05*(-1)" office:value-type="float" office:value="-560000" calcext:value-type="float">
            <text:p><text:s/>(560,000)</text:p>
          </table:table-cell>
          <table:table-cell table:style-name="ce10" table:formula="of:=[.G112]*0.03*(-1)" office:value-type="float" office:value="-336000" calcext:value-type="float">
            <text:p><text:s/>(336,000)</text:p>
          </table:table-cell>
          <table:table-cell table:style-name="ce10" table:formula="of:=[.H112]*0.03*(-1)" office:value-type="float" office:value="-436800" calcext:value-type="float">
            <text:p><text:s/>(436,800)</text:p>
          </table:table-cell>
          <table:table-cell table:style-name="ce10" table:formula="of:=[.I112]*0.03*(-1)" office:value-type="float" office:value="-436800" calcext:value-type="float">
            <text:p><text:s/>(436,800)</text:p>
          </table:table-cell>
          <table:table-cell table:style-name="ce10" table:formula="of:=[.J112]*0.03*(-1)" office:value-type="float" office:value="-537264" calcext:value-type="float">
            <text:p><text:s/>(537,264)</text:p>
          </table:table-cell>
          <table:table-cell table:style-name="ce70" table:formula="of:=[.K112]*0.03*(-1)" office:value-type="float" office:value="-537264" calcext:value-type="float">
            <text:p><text:s/>(537,264)</text:p>
          </table:table-cell>
          <table:table-cell/>
          <table:table-cell table:style-name="ce95" office:value-type="string" calcext:value-type="string">
            <text:p>venta de AF</text:p>
          </table:table-cell>
          <table:table-cell table:style-name="ce11" table:number-columns-repeated="8"/>
          <table:table-cell table:style-name="ce11" table:formula="of:=[$'Deprec. y VR'.I8]" office:value-type="float" office:value="2065000" calcext:value-type="float">
            <text:p>2065000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Gastos Administrativos</text:p>
          </table:table-cell>
          <table:table-cell table:style-name="ce11" table:number-columns-repeated="2"/>
          <table:table-cell table:style-name="ce9" table:formula="of:=30000*12*(-1)" office:value-type="float" office:value="-360000" calcext:value-type="float">
            <text:p><text:s/>(360,000)</text:p>
          </table:table-cell>
          <table:table-cell table:style-name="ce9" table:formula="of:=30000*12*(-1)" office:value-type="float" office:value="-360000" calcext:value-type="float">
            <text:p><text:s/>(360,000)</text:p>
          </table:table-cell>
          <table:table-cell table:style-name="ce9" table:formula="of:=30000*12*(-1)" office:value-type="float" office:value="-360000" calcext:value-type="float">
            <text:p><text:s/>(360,000)</text:p>
          </table:table-cell>
          <table:table-cell table:style-name="ce9" table:formula="of:=30000*12*(-1)" office:value-type="float" office:value="-360000" calcext:value-type="float">
            <text:p><text:s/>(360,000)</text:p>
          </table:table-cell>
          <table:table-cell table:style-name="ce9" table:formula="of:=30000*12*(-1)" office:value-type="float" office:value="-360000" calcext:value-type="float">
            <text:p><text:s/>(360,000)</text:p>
          </table:table-cell>
          <table:table-cell table:style-name="ce9" table:formula="of:=30000*12*(-1)" office:value-type="float" office:value="-360000" calcext:value-type="float">
            <text:p><text:s/>(360,000)</text:p>
          </table:table-cell>
          <table:table-cell table:style-name="ce9" table:formula="of:=30000*12*(-1)" office:value-type="float" office:value="-360000" calcext:value-type="float">
            <text:p><text:s/>(360,000)</text:p>
          </table:table-cell>
          <table:table-cell table:style-name="ce9" table:formula="of:=30000*12*(-1)" office:value-type="float" office:value="-360000" calcext:value-type="float">
            <text:p><text:s/>(360,000)</text:p>
          </table:table-cell>
          <table:table-cell/>
          <table:table-cell table:style-name="ce95" office:value-type="string" calcext:value-type="string">
            <text:p>Capital de trabajo</text:p>
          </table:table-cell>
          <table:table-cell table:style-name="ce10" table:formula="of:=[.C81]" office:value-type="float" office:value="-1976625" calcext:value-type="float">
            <text:p><text:s/>(1,976,625)</text:p>
          </table:table-cell>
          <table:table-cell table:style-name="ce10" table:formula="of:=[.C82]" office:value-type="float" office:value="395325" calcext:value-type="float">
            <text:p><text:s/>395,325 </text:p>
          </table:table-cell>
          <table:table-cell table:style-name="ce11" table:number-columns-repeated="2"/>
          <table:table-cell table:style-name="ce10" table:formula="of:=[.C85]" office:value-type="float" office:value="-474390" calcext:value-type="float">
            <text:p><text:s/>(474,390)</text:p>
          </table:table-cell>
          <table:table-cell table:style-name="ce11"/>
          <table:table-cell table:style-name="ce10" table:formula="of:=[.C87]" office:value-type="float" office:value="-472808.7" calcext:value-type="float">
            <text:p><text:s/>(472,809)</text:p>
          </table:table-cell>
          <table:table-cell table:style-name="ce11" table:number-columns-repeated="2"/>
          <table:table-cell table:number-columns-repeated="16362"/>
        </table:table-row>
        <table:table-row table:style-name="ro1">
          <table:table-cell table:style-name="ce24" office:value-type="string" calcext:value-type="string">
            <text:p>Remuneraciones </text:p>
          </table:table-cell>
          <table:table-cell table:style-name="ce11" table:number-columns-repeated="2"/>
          <table:table-cell table:style-name="ce9" table:formula="of:=-[$planillas.$I$8]" office:value-type="float" office:value="-413655" calcext:value-type="float">
            <text:p><text:s/>(413,655)</text:p>
          </table:table-cell>
          <table:table-cell table:style-name="ce9" table:formula="of:=-[$planillas.$I$8]" office:value-type="float" office:value="-413655" calcext:value-type="float">
            <text:p><text:s/>(413,655)</text:p>
          </table:table-cell>
          <table:table-cell table:style-name="ce9" table:formula="of:=-[$planillas.$I$8]" office:value-type="float" office:value="-413655" calcext:value-type="float">
            <text:p><text:s/>(413,655)</text:p>
          </table:table-cell>
          <table:table-cell table:style-name="ce9" table:formula="of:=[.F116]" office:value-type="float" office:value="-413655" calcext:value-type="float">
            <text:p><text:s/>(413,655)</text:p>
          </table:table-cell>
          <table:table-cell table:style-name="ce9" table:formula="of:=[.G116]" office:value-type="float" office:value="-413655" calcext:value-type="float">
            <text:p><text:s/>(413,655)</text:p>
          </table:table-cell>
          <table:table-cell table:style-name="ce9" table:formula="of:=[.H116]" office:value-type="float" office:value="-413655" calcext:value-type="float">
            <text:p><text:s/>(413,655)</text:p>
          </table:table-cell>
          <table:table-cell table:style-name="ce9" table:formula="of:=[.I116]" office:value-type="float" office:value="-413655" calcext:value-type="float">
            <text:p><text:s/>(413,655)</text:p>
          </table:table-cell>
          <table:table-cell table:style-name="ce69" table:formula="of:=[.J116]" office:value-type="float" office:value="-413655" calcext:value-type="float">
            <text:p><text:s/>(413,655)</text:p>
          </table:table-cell>
          <table:table-cell/>
          <table:table-cell table:style-name="ce95" office:value-type="string" calcext:value-type="string">
            <text:p>Recupero de KW</text:p>
          </table:table-cell>
          <table:table-cell table:style-name="ce11" table:number-columns-repeated="8"/>
          <table:table-cell table:style-name="ce10" table:formula="of:=-SUM([.N115:.U115])" office:value-type="float" office:value="2528498.7" calcext:value-type="float">
            <text:p><text:s/>2,528,499 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Deprec. Infraestructura</text:p>
          </table:table-cell>
          <table:table-cell table:style-name="ce11" table:number-columns-repeated="2"/>
          <table:table-cell table:style-name="ce9" table:formula="of:=[.E58]/20*(-1)" office:value-type="float" office:value="-175000" calcext:value-type="float">
            <text:p><text:s/>(175,000)</text:p>
          </table:table-cell>
          <table:table-cell table:style-name="ce10" table:formula="of:=[.D117]" office:value-type="float" office:value="-175000" calcext:value-type="float">
            <text:p><text:s/>(175,000)</text:p>
          </table:table-cell>
          <table:table-cell table:style-name="ce10" table:formula="of:=[.E117]" office:value-type="float" office:value="-175000" calcext:value-type="float">
            <text:p><text:s/>(175,000)</text:p>
          </table:table-cell>
          <table:table-cell table:style-name="ce10" table:formula="of:=[.F117]" office:value-type="float" office:value="-175000" calcext:value-type="float">
            <text:p><text:s/>(175,000)</text:p>
          </table:table-cell>
          <table:table-cell table:style-name="ce10" table:formula="of:=[.G117]" office:value-type="float" office:value="-175000" calcext:value-type="float">
            <text:p><text:s/>(175,000)</text:p>
          </table:table-cell>
          <table:table-cell table:style-name="ce10" table:formula="of:=[.H117]" office:value-type="float" office:value="-175000" calcext:value-type="float">
            <text:p><text:s/>(175,000)</text:p>
          </table:table-cell>
          <table:table-cell table:style-name="ce10" table:formula="of:=[.I117]" office:value-type="float" office:value="-175000" calcext:value-type="float">
            <text:p><text:s/>(175,000)</text:p>
          </table:table-cell>
          <table:table-cell table:style-name="ce70" table:formula="of:=[.J117]" office:value-type="float" office:value="-175000" calcext:value-type="float">
            <text:p><text:s/>(175,000)</text:p>
          </table:table-cell>
          <table:table-cell/>
          <table:table-cell table:style-name="ce96" office:value-type="string" calcext:value-type="string">
            <text:p>Flujo de Inversión y Liquidación</text:p>
          </table:table-cell>
          <table:table-cell table:style-name="ce54" table:formula="of:=[.N110]+[.N111]+[.N112]+[.N113]+[.N114]+[.N115]+[.N116]" office:value-type="float" office:value="-7576625" calcext:value-type="float">
            <text:p><text:s/>(7,576,625)</text:p>
          </table:table-cell>
          <table:table-cell table:style-name="ce54" table:formula="of:=[.O110]+[.O111]+[.O112]+[.O113]+[.O114]+[.O115]+[.O116]" office:value-type="float" office:value="395325" calcext:value-type="float">
            <text:p><text:s/>395,325 </text:p>
          </table:table-cell>
          <table:table-cell table:style-name="ce54" table:formula="of:=[.P110]+[.P111]+[.P112]+[.P113]+[.P114]+[.P115]+[.P116]" office:value-type="float" office:value="0" calcext:value-type="float">
            <text:p><text:s/>- <text:s text:c="2"/></text:p>
          </table:table-cell>
          <table:table-cell table:style-name="ce54" table:formula="of:=[.Q110]+[.Q111]+[.Q112]+[.Q113]+[.Q114]+[.Q115]+[.Q116]" office:value-type="float" office:value="0" calcext:value-type="float">
            <text:p><text:s/>- <text:s text:c="2"/></text:p>
          </table:table-cell>
          <table:table-cell table:style-name="ce54" table:formula="of:=[.R110]+[.R111]+[.R112]+[.R113]+[.R114]+[.R115]+[.R116]" office:value-type="float" office:value="-474390" calcext:value-type="float">
            <text:p><text:s/>(474,390)</text:p>
          </table:table-cell>
          <table:table-cell table:style-name="ce54" table:formula="of:=[.S110]+[.S111]+[.S112]+[.S113]+[.S114]+[.S115]+[.S116]" office:value-type="float" office:value="0" calcext:value-type="float">
            <text:p><text:s/>- <text:s text:c="2"/></text:p>
          </table:table-cell>
          <table:table-cell table:style-name="ce54" table:formula="of:=[.T110]+[.T111]+[.T112]+[.T113]+[.T114]+[.T115]+[.T116]" office:value-type="float" office:value="-1272808.7" calcext:value-type="float">
            <text:p><text:s/>(1,272,809)</text:p>
          </table:table-cell>
          <table:table-cell table:style-name="ce54" table:formula="of:=[.U110]+[.U111]+[.U112]+[.U113]+[.U114]+[.U115]+[.U116]" office:value-type="float" office:value="0" calcext:value-type="float">
            <text:p><text:s/>- <text:s text:c="2"/></text:p>
          </table:table-cell>
          <table:table-cell table:style-name="ce54" table:formula="of:=[.V110]+[.V111]+[.V112]+[.V113]+[.V114]+[.V115]+[.V116]" office:value-type="float" office:value="5093498.7" calcext:value-type="float">
            <text:p><text:s/>5,093,499 </text:p>
          </table:table-cell>
          <table:table-cell table:style-name="ce76"/>
          <table:table-cell table:number-columns-repeated="16361"/>
        </table:table-row>
        <table:table-row table:style-name="ro1">
          <table:table-cell table:style-name="ce24" office:value-type="string" calcext:value-type="string">
            <text:p>Deprec.Líneas Antiguas</text:p>
          </table:table-cell>
          <table:table-cell table:style-name="ce11" table:number-columns-repeated="2"/>
          <table:table-cell table:style-name="ce10" table:formula="of:=[.E59]/10*(-1)" office:value-type="float" office:value="-160000" calcext:value-type="float">
            <text:p><text:s/>(160,000)</text:p>
          </table:table-cell>
          <table:table-cell table:style-name="ce10" table:formula="of:=[.D118]" office:value-type="float" office:value="-160000" calcext:value-type="float">
            <text:p><text:s/>(160,000)</text:p>
          </table:table-cell>
          <table:table-cell table:style-name="ce10" table:formula="of:=[.E118]" office:value-type="float" office:value="-160000" calcext:value-type="float">
            <text:p><text:s/>(160,000)</text:p>
          </table:table-cell>
          <table:table-cell table:style-name="ce10" table:formula="of:=[.F118]" office:value-type="float" office:value="-160000" calcext:value-type="float">
            <text:p><text:s/>(160,000)</text:p>
          </table:table-cell>
          <table:table-cell table:style-name="ce10" table:formula="of:=[.G118]" office:value-type="float" office:value="-160000" calcext:value-type="float">
            <text:p><text:s/>(160,000)</text:p>
          </table:table-cell>
          <table:table-cell table:style-name="ce10" table:formula="of:=[.H118]" office:value-type="float" office:value="-160000" calcext:value-type="float">
            <text:p><text:s/>(160,000)</text:p>
          </table:table-cell>
          <table:table-cell table:style-name="ce10" table:formula="of:=[.I118]" office:value-type="float" office:value="-160000" calcext:value-type="float">
            <text:p><text:s/>(160,000)</text:p>
          </table:table-cell>
          <table:table-cell table:style-name="ce70" table:formula="of:=[.J118]" office:value-type="float" office:value="-160000" calcext:value-type="float">
            <text:p><text:s/>(160,000)</text:p>
          </table:table-cell>
          <table:table-cell/>
          <table:table-cell table:style-name="ce95" office:value-type="string" calcext:value-type="string">
            <text:p>Ventas</text:p>
          </table:table-cell>
          <table:table-cell table:style-name="ce10"/>
          <table:table-cell table:style-name="ce10" table:formula="of:=[.D112]" office:value-type="float" office:value="14000000" calcext:value-type="float">
            <text:p><text:s/>14,000,000 </text:p>
          </table:table-cell>
          <table:table-cell table:style-name="ce10" table:formula="of:=[.E112]" office:value-type="float" office:value="11200000" calcext:value-type="float">
            <text:p><text:s/>11,200,000 </text:p>
          </table:table-cell>
          <table:table-cell table:style-name="ce10" table:formula="of:=[.F112]" office:value-type="float" office:value="11200000" calcext:value-type="float">
            <text:p><text:s/>11,200,000 </text:p>
          </table:table-cell>
          <table:table-cell table:style-name="ce10" table:formula="of:=[.G112]" office:value-type="float" office:value="11200000" calcext:value-type="float">
            <text:p><text:s/>11,200,000 </text:p>
          </table:table-cell>
          <table:table-cell table:style-name="ce10" table:formula="of:=[.H112]" office:value-type="float" office:value="14560000" calcext:value-type="float">
            <text:p><text:s/>14,560,000 </text:p>
          </table:table-cell>
          <table:table-cell table:style-name="ce10" table:formula="of:=[.I112]" office:value-type="float" office:value="14560000" calcext:value-type="float">
            <text:p><text:s/>14,560,000 </text:p>
          </table:table-cell>
          <table:table-cell table:style-name="ce10" table:formula="of:=[.J112]" office:value-type="float" office:value="17908800" calcext:value-type="float">
            <text:p><text:s/>17,908,800 </text:p>
          </table:table-cell>
          <table:table-cell table:style-name="ce10" table:formula="of:=[.K112]" office:value-type="float" office:value="17908800" calcext:value-type="float">
            <text:p><text:s/>17,908,800 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Deprec. Línea Nueva</text:p>
          </table:table-cell>
          <table:table-cell table:style-name="ce11" table:number-columns-repeated="8"/>
          <table:table-cell table:style-name="ce9" table:formula="of:=800000/10*(-1)" office:value-type="float" office:value="-80000" calcext:value-type="float">
            <text:p><text:s/>(80,000)</text:p>
          </table:table-cell>
          <table:table-cell table:style-name="ce70" table:formula="of:=[.J119]" office:value-type="float" office:value="-80000" calcext:value-type="float">
            <text:p><text:s/>(80,000)</text:p>
          </table:table-cell>
          <table:table-cell table:style-name="ce76" table:formula="of:=SUM([.K117:.K119])" office:value-type="float" office:value="-415000" calcext:value-type="float">
            <text:p><text:s/>(415,000)</text:p>
          </table:table-cell>
          <table:table-cell table:style-name="ce95" office:value-type="string" calcext:value-type="string">
            <text:p>Costos de producción</text:p>
          </table:table-cell>
          <table:table-cell table:style-name="ce11"/>
          <table:table-cell table:style-name="ce10" table:formula="of:=[.D113]" office:value-type="float" office:value="-7906500" calcext:value-type="float">
            <text:p><text:s/>(7,906,500)</text:p>
          </table:table-cell>
          <table:table-cell table:style-name="ce10" table:formula="of:=[.E113]" office:value-type="float" office:value="-6325200" calcext:value-type="float">
            <text:p><text:s/>(6,325,200)</text:p>
          </table:table-cell>
          <table:table-cell table:style-name="ce10" table:formula="of:=[.F113]" office:value-type="float" office:value="-6325200" calcext:value-type="float">
            <text:p><text:s/>(6,325,200)</text:p>
          </table:table-cell>
          <table:table-cell table:style-name="ce10" table:formula="of:=[.G113]" office:value-type="float" office:value="-6325200" calcext:value-type="float">
            <text:p><text:s/>(6,325,200)</text:p>
          </table:table-cell>
          <table:table-cell table:style-name="ce10" table:formula="of:=[.H113]" office:value-type="float" office:value="-8222760" calcext:value-type="float">
            <text:p><text:s/>(8,222,760)</text:p>
          </table:table-cell>
          <table:table-cell table:style-name="ce10" table:formula="of:=[.I113]" office:value-type="float" office:value="-8222760" calcext:value-type="float">
            <text:p><text:s/>(8,222,760)</text:p>
          </table:table-cell>
          <table:table-cell table:style-name="ce10" table:formula="of:=[.J113]" office:value-type="float" office:value="-10113994.8" calcext:value-type="float">
            <text:p><text:s/>(10,113,995)</text:p>
          </table:table-cell>
          <table:table-cell table:style-name="ce10" table:formula="of:=[.K113]" office:value-type="float" office:value="-10113994.8" calcext:value-type="float">
            <text:p><text:s/>(10,113,995)</text:p>
          </table:table-cell>
          <table:table-cell table:number-columns-repeated="16362"/>
        </table:table-row>
        <table:table-row table:style-name="ro1">
          <table:table-cell table:style-name="ce24"/>
          <table:table-cell table:style-name="ce11" table:number-columns-repeated="8"/>
          <table:table-cell table:style-name="ce9"/>
          <table:table-cell table:style-name="ce70"/>
          <table:table-cell/>
          <table:table-cell table:style-name="ce95" office:value-type="string" calcext:value-type="string">
            <text:p>Royalty</text:p>
          </table:table-cell>
          <table:table-cell table:style-name="ce11"/>
          <table:table-cell table:style-name="ce10" table:formula="of:=[.D114]" office:value-type="float" office:value="-700000" calcext:value-type="float">
            <text:p><text:s/>(700,000)</text:p>
          </table:table-cell>
          <table:table-cell table:style-name="ce10" table:formula="of:=[.E114]" office:value-type="float" office:value="-560000" calcext:value-type="float">
            <text:p><text:s/>(560,000)</text:p>
          </table:table-cell>
          <table:table-cell table:style-name="ce10" table:formula="of:=[.F114]" office:value-type="float" office:value="-560000" calcext:value-type="float">
            <text:p><text:s/>(560,000)</text:p>
          </table:table-cell>
          <table:table-cell table:style-name="ce10" table:formula="of:=[.G114]" office:value-type="float" office:value="-336000" calcext:value-type="float">
            <text:p><text:s/>(336,000)</text:p>
          </table:table-cell>
          <table:table-cell table:style-name="ce10" table:formula="of:=[.H114]" office:value-type="float" office:value="-436800" calcext:value-type="float">
            <text:p><text:s/>(436,800)</text:p>
          </table:table-cell>
          <table:table-cell table:style-name="ce10" table:formula="of:=[.I114]" office:value-type="float" office:value="-436800" calcext:value-type="float">
            <text:p><text:s/>(436,800)</text:p>
          </table:table-cell>
          <table:table-cell table:style-name="ce10" table:formula="of:=[.J114]" office:value-type="float" office:value="-537264" calcext:value-type="float">
            <text:p><text:s/>(537,264)</text:p>
          </table:table-cell>
          <table:table-cell table:style-name="ce10" table:formula="of:=[.K114]" office:value-type="float" office:value="-537264" calcext:value-type="float">
            <text:p><text:s/>(537,264)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Venta de Infraestructura</text:p>
          </table:table-cell>
          <table:table-cell table:style-name="ce11" table:number-columns-repeated="9"/>
          <table:table-cell table:style-name="ce70" table:formula="of:=[.E58]*0.35" office:value-type="float" office:value="1225000" calcext:value-type="float">
            <text:p><text:s/>1,225,000 </text:p>
          </table:table-cell>
          <table:table-cell/>
          <table:table-cell table:style-name="ce95" office:value-type="string" calcext:value-type="string">
            <text:p>Gastos administrativos</text:p>
          </table:table-cell>
          <table:table-cell table:style-name="ce11"/>
          <table:table-cell table:style-name="ce10" table:formula="of:=[.D115]" office:value-type="float" office:value="-360000" calcext:value-type="float">
            <text:p><text:s/>(360,000)</text:p>
          </table:table-cell>
          <table:table-cell table:style-name="ce10" table:formula="of:=[.E115]" office:value-type="float" office:value="-360000" calcext:value-type="float">
            <text:p><text:s/>(360,000)</text:p>
          </table:table-cell>
          <table:table-cell table:style-name="ce10" table:formula="of:=[.F115]" office:value-type="float" office:value="-360000" calcext:value-type="float">
            <text:p><text:s/>(360,000)</text:p>
          </table:table-cell>
          <table:table-cell table:style-name="ce10" table:formula="of:=[.G115]" office:value-type="float" office:value="-360000" calcext:value-type="float">
            <text:p><text:s/>(360,000)</text:p>
          </table:table-cell>
          <table:table-cell table:style-name="ce10" table:formula="of:=[.H115]" office:value-type="float" office:value="-360000" calcext:value-type="float">
            <text:p><text:s/>(360,000)</text:p>
          </table:table-cell>
          <table:table-cell table:style-name="ce10" table:formula="of:=[.I115]" office:value-type="float" office:value="-360000" calcext:value-type="float">
            <text:p><text:s/>(360,000)</text:p>
          </table:table-cell>
          <table:table-cell table:style-name="ce10" table:formula="of:=[.J115]" office:value-type="float" office:value="-360000" calcext:value-type="float">
            <text:p><text:s/>(360,000)</text:p>
          </table:table-cell>
          <table:table-cell table:style-name="ce10" table:formula="of:=[.K115]" office:value-type="float" office:value="-360000" calcext:value-type="float">
            <text:p><text:s/>(360,000)</text:p>
          </table:table-cell>
          <table:table-cell table:number-columns-repeated="16362"/>
        </table:table-row>
        <table:table-row table:style-name="ro1">
          <table:table-cell table:style-name="ce23" office:value-type="string" calcext:value-type="string">
            <text:p>Valor Contable</text:p>
          </table:table-cell>
          <table:table-cell table:style-name="ce11" table:number-columns-repeated="9"/>
          <table:table-cell table:style-name="ce69" table:formula="of:=([.E58]-(([.E58]/20)*8))*(-1)" office:value-type="float" office:value="-2100000" calcext:value-type="float">
            <text:p><text:s/>(2,100,000)</text:p>
          </table:table-cell>
          <table:table-cell/>
          <table:table-cell table:style-name="ce95" office:value-type="string" calcext:value-type="string">
            <text:p>Remuneraciones</text:p>
          </table:table-cell>
          <table:table-cell table:style-name="ce11"/>
          <table:table-cell table:style-name="ce10" table:formula="of:=[.D116]" office:value-type="float" office:value="-413655" calcext:value-type="float">
            <text:p><text:s/>(413,655)</text:p>
          </table:table-cell>
          <table:table-cell table:style-name="ce10" table:formula="of:=[.E116]" office:value-type="float" office:value="-413655" calcext:value-type="float">
            <text:p><text:s/>(413,655)</text:p>
          </table:table-cell>
          <table:table-cell table:style-name="ce10" table:formula="of:=[.F116]" office:value-type="float" office:value="-413655" calcext:value-type="float">
            <text:p><text:s/>(413,655)</text:p>
          </table:table-cell>
          <table:table-cell table:style-name="ce10" table:formula="of:=[.G116]" office:value-type="float" office:value="-413655" calcext:value-type="float">
            <text:p><text:s/>(413,655)</text:p>
          </table:table-cell>
          <table:table-cell table:style-name="ce10" table:formula="of:=[.H116]" office:value-type="float" office:value="-413655" calcext:value-type="float">
            <text:p><text:s/>(413,655)</text:p>
          </table:table-cell>
          <table:table-cell table:style-name="ce10" table:formula="of:=[.I116]" office:value-type="float" office:value="-413655" calcext:value-type="float">
            <text:p><text:s/>(413,655)</text:p>
          </table:table-cell>
          <table:table-cell table:style-name="ce10" table:formula="of:=[.J116]" office:value-type="float" office:value="-413655" calcext:value-type="float">
            <text:p><text:s/>(413,655)</text:p>
          </table:table-cell>
          <table:table-cell table:style-name="ce10" table:formula="of:=[.K116]" office:value-type="float" office:value="-413655" calcext:value-type="float">
            <text:p><text:s/>(413,655)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Venta Linea Antigua</text:p>
          </table:table-cell>
          <table:table-cell table:style-name="ce11" table:number-columns-repeated="9"/>
          <table:table-cell table:style-name="ce70" table:formula="of:=[.E59]*0.35" office:value-type="float" office:value="560000" calcext:value-type="float">
            <text:p><text:s/>560,000 </text:p>
          </table:table-cell>
          <table:table-cell/>
          <table:table-cell table:style-name="ce95" office:value-type="string" calcext:value-type="string">
            <text:p>Pago de IGV</text:p>
          </table:table-cell>
          <table:table-cell table:style-name="ce11" table:formula="of:=[.N137]" office:value-type="float" office:value="0" calcext:value-type="float">
            <text:p>0</text:p>
          </table:table-cell>
          <table:table-cell table:style-name="ce64" table:formula="of:=[.O137]" office:value-type="float" office:value="-24030" calcext:value-type="float">
            <text:p>-24,030.0 </text:p>
          </table:table-cell>
          <table:table-cell table:style-name="ce108" table:formula="of:=[.P137]" office:value-type="float" office:value="-812664" calcext:value-type="float">
            <text:p>-812,664 </text:p>
          </table:table-cell>
          <table:table-cell table:style-name="ce108" table:formula="of:=[.Q137]" office:value-type="float" office:value="-812664" calcext:value-type="float">
            <text:p>-812,664 </text:p>
          </table:table-cell>
          <table:table-cell table:style-name="ce108" table:formula="of:=[.R137]" office:value-type="float" office:value="-812664" calcext:value-type="float">
            <text:p>-812,664 </text:p>
          </table:table-cell>
          <table:table-cell table:style-name="ce108" table:formula="of:=[.S137]" office:value-type="float" office:value="-1075903.2" calcext:value-type="float">
            <text:p>-1,075,903 </text:p>
          </table:table-cell>
          <table:table-cell table:style-name="ce108" table:formula="of:=[.T137]" office:value-type="float" office:value="-931903.2" calcext:value-type="float">
            <text:p>-931,903 </text:p>
          </table:table-cell>
          <table:table-cell table:style-name="ce108" table:formula="of:=[.U137]" office:value-type="float" office:value="-1338264.936" calcext:value-type="float">
            <text:p>-1,338,265 </text:p>
          </table:table-cell>
          <table:table-cell table:style-name="ce108" table:formula="of:=[.V137]" office:value-type="float" office:value="-1338264.936" calcext:value-type="float">
            <text:p>-1,338,265 </text:p>
          </table:table-cell>
          <table:table-cell table:number-columns-repeated="16362"/>
        </table:table-row>
        <table:table-row table:style-name="ro1">
          <table:table-cell table:style-name="ce23" office:value-type="string" calcext:value-type="string">
            <text:p>Valor en Libro Linea Antigua</text:p>
          </table:table-cell>
          <table:table-cell table:style-name="ce11" table:number-columns-repeated="9"/>
          <table:table-cell table:style-name="ce70" table:formula="of:=([.E59]-([.E59]/10)*8)*(-1)" office:value-type="float" office:value="-320000" calcext:value-type="float">
            <text:p><text:s/>(320,000)</text:p>
          </table:table-cell>
          <table:table-cell/>
          <table:table-cell table:style-name="ce95" office:value-type="string" calcext:value-type="string">
            <text:p>Impuestos </text:p>
          </table:table-cell>
          <table:table-cell table:style-name="ce11"/>
          <table:table-cell table:style-name="ce10" table:formula="of:=[.D130]" office:value-type="float" office:value="-1264029.275" calcext:value-type="float">
            <text:p><text:s/>(1,264,029)</text:p>
          </table:table-cell>
          <table:table-cell table:style-name="ce10" table:formula="of:=[.E130]" office:value-type="float" office:value="-945812.775" calcext:value-type="float">
            <text:p><text:s/>(945,813)</text:p>
          </table:table-cell>
          <table:table-cell table:style-name="ce10" table:formula="of:=[.F130]" office:value-type="float" office:value="-945812.775" calcext:value-type="float">
            <text:p><text:s/>(945,813)</text:p>
          </table:table-cell>
          <table:table-cell table:style-name="ce10" table:formula="of:=[.G130]" office:value-type="float" office:value="-1011892.775" calcext:value-type="float">
            <text:p><text:s/>(1,011,893)</text:p>
          </table:table-cell>
          <table:table-cell table:style-name="ce10" table:formula="of:=[.H130]" office:value-type="float" office:value="-1413576.575" calcext:value-type="float">
            <text:p><text:s/>(1,413,577)</text:p>
          </table:table-cell>
          <table:table-cell table:style-name="ce10" table:formula="of:=[.I130]" office:value-type="float" office:value="-1413576.575" calcext:value-type="float">
            <text:p><text:s/>(1,413,577)</text:p>
          </table:table-cell>
          <table:table-cell table:style-name="ce10" table:formula="of:=[.J130]" office:value-type="float" office:value="-1790321.429" calcext:value-type="float">
            <text:p><text:s/>(1,790,321)</text:p>
          </table:table-cell>
          <table:table-cell table:style-name="ce10" table:formula="of:=[.K130]" office:value-type="float" office:value="-1496796.429" calcext:value-type="float">
            <text:p><text:s/>(1,496,796)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Venta Línea Nueva</text:p>
          </table:table-cell>
          <table:table-cell table:style-name="ce11" table:number-columns-repeated="9"/>
          <table:table-cell table:style-name="ce70" table:formula="of:=[.E59]/2*0.35" office:value-type="float" office:value="280000" calcext:value-type="float">
            <text:p><text:s/>280,000 </text:p>
          </table:table-cell>
          <table:table-cell/>
          <table:table-cell table:style-name="ce96" office:value-type="string" calcext:value-type="string">
            <text:p>Flujo Operativo </text:p>
          </table:table-cell>
          <table:table-cell table:style-name="ce54" table:formula="of:=[.N118]+[.N119]+[.N120]+[.N121]+[.N122]+[.N123]+[.N124]" office:value-type="float" office:value="0" calcext:value-type="float">
            <text:p><text:s/>- <text:s text:c="2"/></text:p>
          </table:table-cell>
          <table:table-cell table:style-name="ce54" table:formula="of:=[.O118]+[.O119]+[.O120]+[.O121]+[.O122]+[.O123]+[.O124]" office:value-type="float" office:value="3331785.725" calcext:value-type="float">
            <text:p><text:s/>3,331,786 </text:p>
          </table:table-cell>
          <table:table-cell table:style-name="ce54" table:formula="of:=[.P118]+[.P119]+[.P120]+[.P121]+[.P122]+[.P123]+[.P124]" office:value-type="float" office:value="1782668.225" calcext:value-type="float">
            <text:p><text:s/>1,782,668 </text:p>
          </table:table-cell>
          <table:table-cell table:style-name="ce54" table:formula="of:=[.Q118]+[.Q119]+[.Q120]+[.Q121]+[.Q122]+[.Q123]+[.Q124]" office:value-type="float" office:value="1782668.225" calcext:value-type="float">
            <text:p><text:s/>1,782,668 </text:p>
          </table:table-cell>
          <table:table-cell table:style-name="ce54" table:formula="of:=[.R118]+[.R119]+[.R120]+[.R121]+[.R122]+[.R123]+[.R124]" office:value-type="float" office:value="1940588.225" calcext:value-type="float">
            <text:p><text:s/>1,940,588 </text:p>
          </table:table-cell>
          <table:table-cell table:style-name="ce54" table:formula="of:=[.S118]+[.S119]+[.S120]+[.S121]+[.S122]+[.S123]+[.S124]" office:value-type="float" office:value="2637305.225" calcext:value-type="float">
            <text:p><text:s/>2,637,305 </text:p>
          </table:table-cell>
          <table:table-cell table:style-name="ce54" table:formula="of:=[.T118]+[.T119]+[.T120]+[.T121]+[.T122]+[.T123]+[.T124]" office:value-type="float" office:value="2781305.225" calcext:value-type="float">
            <text:p><text:s/>2,781,305 </text:p>
          </table:table-cell>
          <table:table-cell table:style-name="ce54" table:formula="of:=[.U118]+[.U119]+[.U120]+[.U121]+[.U122]+[.U123]+[.U124]" office:value-type="float" office:value="3355299.835" calcext:value-type="float">
            <text:p><text:s/>3,355,300 </text:p>
          </table:table-cell>
          <table:table-cell table:style-name="ce54" table:formula="of:=[.V118]+[.V119]+[.V120]+[.V121]+[.V122]+[.V123]+[.V124]" office:value-type="float" office:value="3648824.835" calcext:value-type="float">
            <text:p><text:s/>3,648,825 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Valor en libro Linea Nueva</text:p>
          </table:table-cell>
          <table:table-cell table:style-name="ce11" table:number-columns-repeated="9"/>
          <table:table-cell table:style-name="ce70" table:formula="of:=(([.E59]/2)- ([.E59]/2)/10*2)*(-1)" office:value-type="float" office:value="-640000" calcext:value-type="float">
            <text:p><text:s/>(640,000)</text:p>
          </table:table-cell>
          <table:table-cell table:style-name="ce76"/>
          <table:table-cell table:style-name="ce97" office:value-type="string" calcext:value-type="string">
            <text:p>Flujo de Caja Económico</text:p>
          </table:table-cell>
          <table:table-cell table:style-name="ce103" table:formula="of:=[.N117]+[.N125]" office:value-type="float" office:value="-7576625" calcext:value-type="float">
            <text:p><text:s/>(7,576,625)</text:p>
          </table:table-cell>
          <table:table-cell table:style-name="ce103" table:formula="of:=[.O117]+[.O125]" office:value-type="float" office:value="3727110.725" calcext:value-type="float">
            <text:p><text:s/>3,727,111 </text:p>
          </table:table-cell>
          <table:table-cell table:style-name="ce103" table:formula="of:=[.P117]+[.P125]" office:value-type="float" office:value="1782668.225" calcext:value-type="float">
            <text:p><text:s/>1,782,668 </text:p>
          </table:table-cell>
          <table:table-cell table:style-name="ce103" table:formula="of:=[.Q117]+[.Q125]" office:value-type="float" office:value="1782668.225" calcext:value-type="float">
            <text:p><text:s/>1,782,668 </text:p>
          </table:table-cell>
          <table:table-cell table:style-name="ce103" table:formula="of:=[.R117]+[.R125]" office:value-type="float" office:value="1466198.225" calcext:value-type="float">
            <text:p><text:s/>1,466,198 </text:p>
          </table:table-cell>
          <table:table-cell table:style-name="ce103" table:formula="of:=[.S117]+[.S125]" office:value-type="float" office:value="2637305.225" calcext:value-type="float">
            <text:p><text:s/>2,637,305 </text:p>
          </table:table-cell>
          <table:table-cell table:style-name="ce103" table:formula="of:=[.T117]+[.T125]" office:value-type="float" office:value="1508496.525" calcext:value-type="float">
            <text:p><text:s/>1,508,497 </text:p>
          </table:table-cell>
          <table:table-cell table:style-name="ce103" table:formula="of:=[.U117]+[.U125]" office:value-type="float" office:value="3355299.835" calcext:value-type="float">
            <text:p><text:s/>3,355,300 </text:p>
          </table:table-cell>
          <table:table-cell table:style-name="ce103" table:formula="of:=[.V117]+[.V125]" office:value-type="float" office:value="8742323.535" calcext:value-type="float">
            <text:p><text:s/>8,742,324 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Valor libro de terreno</text:p>
          </table:table-cell>
          <table:table-cell table:style-name="ce11" table:number-columns-repeated="9"/>
          <table:table-cell table:style-name="ce70" table:formula="of:=-[.E60]" office:value-type="float" office:value="-500000" calcext:value-type="float">
            <text:p><text:s/>(500,000)</text:p>
          </table:table-cell>
          <table:table-cell table:style-name="ce76"/>
          <table:table-cell table:number-columns-repeated="2"/>
          <table:table-cell table:style-name="ce107" table:number-columns-repeated="8"/>
          <table:table-cell table:number-columns-repeated="16362"/>
        </table:table-row>
        <table:table-row table:style-name="ro1">
          <table:table-cell table:style-name="ce23" office:value-type="string" calcext:value-type="string">
            <text:p>Venta de terreno</text:p>
          </table:table-cell>
          <table:table-cell table:style-name="ce11" table:number-columns-repeated="9"/>
          <table:table-cell table:style-name="ce80" office:value-type="float" office:value="500000" calcext:value-type="float">
            <text:p>500000</text:p>
          </table:table-cell>
          <table:table-cell table:style-name="ce76" table:formula="of:=SUM([.K121:.K128])" office:value-type="float" office:value="-995000" calcext:value-type="float">
            <text:p><text:s/>(995,000)</text:p>
          </table:table-cell>
          <table:table-cell table:number-columns-repeated="2"/>
          <table:table-cell table:style-name="ce107" table:number-columns-repeated="8"/>
          <table:table-cell table:style-name="ce76"/>
          <table:table-cell table:number-columns-repeated="16361"/>
        </table:table-row>
        <table:table-row table:style-name="ro1">
          <table:table-cell table:style-name="ce25" office:value-type="string" calcext:value-type="string">
            <text:p>Utilidad antes de Imp.</text:p>
          </table:table-cell>
          <table:table-cell table:style-name="ce38" table:number-columns-repeated="2"/>
          <table:table-cell table:style-name="ce54" table:formula="of:=SUM([.D112:.D128])" office:value-type="float" office:value="4284845" calcext:value-type="float">
            <text:p><text:s/>4,284,845 </text:p>
          </table:table-cell>
          <table:table-cell table:style-name="ce54" table:formula="of:=SUM([.E112:.E128])" office:value-type="float" office:value="3206145" calcext:value-type="float">
            <text:p><text:s/>3,206,145 </text:p>
          </table:table-cell>
          <table:table-cell table:style-name="ce54" table:formula="of:=SUM([.F112:.F128])" office:value-type="float" office:value="3206145" calcext:value-type="float">
            <text:p><text:s/>3,206,145 </text:p>
          </table:table-cell>
          <table:table-cell table:style-name="ce54" table:formula="of:=SUM([.G112:.G128])" office:value-type="float" office:value="3430145" calcext:value-type="float">
            <text:p><text:s/>3,430,145 </text:p>
          </table:table-cell>
          <table:table-cell table:style-name="ce54" table:formula="of:=SUM([.H112:.H128])" office:value-type="float" office:value="4791785" calcext:value-type="float">
            <text:p><text:s/>4,791,785 </text:p>
          </table:table-cell>
          <table:table-cell table:style-name="ce54" table:formula="of:=SUM([.I112:.I128])" office:value-type="float" office:value="4791785" calcext:value-type="float">
            <text:p><text:s/>4,791,785 </text:p>
          </table:table-cell>
          <table:table-cell table:style-name="ce54" table:formula="of:=SUM([.J112:.J128])" office:value-type="float" office:value="6068886.2" calcext:value-type="float">
            <text:p><text:s/>6,068,886 </text:p>
          </table:table-cell>
          <table:table-cell table:style-name="ce92" table:formula="of:=SUM([.K112:.K128])" office:value-type="float" office:value="5073886.2" calcext:value-type="float">
            <text:p><text:s/>5,073,886 </text:p>
          </table:table-cell>
          <table:table-cell/>
          <table:table-cell table:style-name="ce1" office:value-type="string" calcext:value-type="string" table:number-columns-spanned="10" table:number-rows-spanned="1">
            <text:p>PAGO DE IMPUESTO GENERAL A LAS VENTAS</text:p>
          </table:table-cell>
          <table:covered-table-cell table:number-columns-repeated="9" table:style-name="ce6"/>
          <table:table-cell table:number-columns-repeated="16362"/>
        </table:table-row>
        <table:table-row table:style-name="ro1">
          <table:table-cell table:style-name="ce23" office:value-type="string" calcext:value-type="string">
            <text:p>Impuesto ( 29.5%)</text:p>
          </table:table-cell>
          <table:table-cell table:style-name="ce11" table:number-columns-repeated="2"/>
          <table:table-cell table:style-name="ce10" table:formula="of:=[.D129]*0.295*(-1)" office:value-type="float" office:value="-1264029.275" calcext:value-type="float">
            <text:p><text:s/>(1,264,029)</text:p>
          </table:table-cell>
          <table:table-cell table:style-name="ce10" table:formula="of:=[.E129]*0.295*(-1)" office:value-type="float" office:value="-945812.775" calcext:value-type="float">
            <text:p><text:s/>(945,813)</text:p>
          </table:table-cell>
          <table:table-cell table:style-name="ce10" table:formula="of:=[.F129]*0.295*(-1)" office:value-type="float" office:value="-945812.775" calcext:value-type="float">
            <text:p><text:s/>(945,813)</text:p>
          </table:table-cell>
          <table:table-cell table:style-name="ce10" table:formula="of:=[.G129]*0.295*(-1)" office:value-type="float" office:value="-1011892.775" calcext:value-type="float">
            <text:p><text:s/>(1,011,893)</text:p>
          </table:table-cell>
          <table:table-cell table:style-name="ce10" table:formula="of:=[.H129]*0.295*(-1)" office:value-type="float" office:value="-1413576.575" calcext:value-type="float">
            <text:p><text:s/>(1,413,577)</text:p>
          </table:table-cell>
          <table:table-cell table:style-name="ce10" table:formula="of:=[.I129]*0.295*(-1)" office:value-type="float" office:value="-1413576.575" calcext:value-type="float">
            <text:p><text:s/>(1,413,577)</text:p>
          </table:table-cell>
          <table:table-cell table:style-name="ce10" table:formula="of:=[.J129]*0.295*(-1)" office:value-type="float" office:value="-1790321.429" calcext:value-type="float">
            <text:p><text:s/>(1,790,321)</text:p>
          </table:table-cell>
          <table:table-cell table:style-name="ce10" table:formula="of:=[.K129]*0.295*(-1)" office:value-type="float" office:value="-1496796.429" calcext:value-type="float">
            <text:p><text:s/>(1,496,796)</text:p>
          </table:table-cell>
          <table:table-cell/>
          <table:table-cell table:style-name="ce15" office:value-type="string" calcext:value-type="string">
            <text:p>RUBRO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.N130]+1" office:value-type="float" office:value="1" calcext:value-type="float">
            <text:p>1</text:p>
          </table:table-cell>
          <table:table-cell table:style-name="ce15" table:formula="of:=[.O130]+1" office:value-type="float" office:value="2" calcext:value-type="float">
            <text:p>2</text:p>
          </table:table-cell>
          <table:table-cell table:style-name="ce15" table:formula="of:=[.P130]+1" office:value-type="float" office:value="3" calcext:value-type="float">
            <text:p>3</text:p>
          </table:table-cell>
          <table:table-cell table:style-name="ce15" table:formula="of:=[.Q130]+1" office:value-type="float" office:value="4" calcext:value-type="float">
            <text:p>4</text:p>
          </table:table-cell>
          <table:table-cell table:style-name="ce15" table:formula="of:=[.R130]+1" office:value-type="float" office:value="5" calcext:value-type="float">
            <text:p>5</text:p>
          </table:table-cell>
          <table:table-cell table:style-name="ce15" table:formula="of:=[.S130]+1" office:value-type="float" office:value="6" calcext:value-type="float">
            <text:p>6</text:p>
          </table:table-cell>
          <table:table-cell table:style-name="ce15" table:formula="of:=[.T130]+1" office:value-type="float" office:value="7" calcext:value-type="float">
            <text:p>7</text:p>
          </table:table-cell>
          <table:table-cell table:style-name="ce15" table:formula="of:=[.U130]+1" office:value-type="float" office:value="8" calcext:value-type="float">
            <text:p>8</text:p>
          </table:table-cell>
          <table:table-cell table:number-columns-repeated="16362"/>
        </table:table-row>
        <table:table-row table:style-name="ro1">
          <table:table-cell table:style-name="ce25" office:value-type="string" calcext:value-type="string">
            <text:p>Utilidad neta</text:p>
          </table:table-cell>
          <table:table-cell table:style-name="ce38" table:number-columns-repeated="2"/>
          <table:table-cell table:style-name="ce54" table:formula="of:=[.D129]+[.D130]" office:value-type="float" office:value="3020815.725" calcext:value-type="float">
            <text:p><text:s/>3,020,816 </text:p>
          </table:table-cell>
          <table:table-cell table:style-name="ce54" table:formula="of:=[.E129]+[.E130]" office:value-type="float" office:value="2260332.225" calcext:value-type="float">
            <text:p><text:s/>2,260,332 </text:p>
          </table:table-cell>
          <table:table-cell table:style-name="ce54" table:formula="of:=[.F129]+[.F130]" office:value-type="float" office:value="2260332.225" calcext:value-type="float">
            <text:p><text:s/>2,260,332 </text:p>
          </table:table-cell>
          <table:table-cell table:style-name="ce54" table:formula="of:=[.G129]+[.G130]" office:value-type="float" office:value="2418252.225" calcext:value-type="float">
            <text:p><text:s/>2,418,252 </text:p>
          </table:table-cell>
          <table:table-cell table:style-name="ce54" table:formula="of:=[.H129]+[.H130]" office:value-type="float" office:value="3378208.425" calcext:value-type="float">
            <text:p><text:s/>3,378,208 </text:p>
          </table:table-cell>
          <table:table-cell table:style-name="ce54" table:formula="of:=[.I129]+[.I130]" office:value-type="float" office:value="3378208.425" calcext:value-type="float">
            <text:p><text:s/>3,378,208 </text:p>
          </table:table-cell>
          <table:table-cell table:style-name="ce54" table:formula="of:=[.J129]+[.J130]" office:value-type="float" office:value="4278564.771" calcext:value-type="float">
            <text:p><text:s/>4,278,565 </text:p>
          </table:table-cell>
          <table:table-cell table:style-name="ce92" table:formula="of:=[.K129]+[.K130]" office:value-type="float" office:value="3577089.771" calcext:value-type="float">
            <text:p><text:s/>3,577,090 </text:p>
          </table:table-cell>
          <table:table-cell/>
          <table:table-cell table:style-name="ce3" office:value-type="string" calcext:value-type="string">
            <text:p>Ventas</text:p>
          </table:table-cell>
          <table:table-cell table:style-name="ce11"/>
          <table:table-cell table:style-name="ce10" table:formula="of:=[.O118]" office:value-type="float" office:value="14000000" calcext:value-type="float">
            <text:p><text:s/>14,000,000 </text:p>
          </table:table-cell>
          <table:table-cell table:style-name="ce10" table:formula="of:=[.P118]" office:value-type="float" office:value="11200000" calcext:value-type="float">
            <text:p><text:s/>11,200,000 </text:p>
          </table:table-cell>
          <table:table-cell table:style-name="ce10" table:formula="of:=[.Q118]" office:value-type="float" office:value="11200000" calcext:value-type="float">
            <text:p><text:s/>11,200,000 </text:p>
          </table:table-cell>
          <table:table-cell table:style-name="ce10" table:formula="of:=[.R118]" office:value-type="float" office:value="11200000" calcext:value-type="float">
            <text:p><text:s/>11,200,000 </text:p>
          </table:table-cell>
          <table:table-cell table:style-name="ce10" table:formula="of:=[.S118]" office:value-type="float" office:value="14560000" calcext:value-type="float">
            <text:p><text:s/>14,560,000 </text:p>
          </table:table-cell>
          <table:table-cell table:style-name="ce10" table:formula="of:=[.T118]" office:value-type="float" office:value="14560000" calcext:value-type="float">
            <text:p><text:s/>14,560,000 </text:p>
          </table:table-cell>
          <table:table-cell table:style-name="ce10" table:formula="of:=[.U118]" office:value-type="float" office:value="17908800" calcext:value-type="float">
            <text:p><text:s/>17,908,800 </text:p>
          </table:table-cell>
          <table:table-cell table:style-name="ce10" table:formula="of:=[.V118]" office:value-type="float" office:value="17908800" calcext:value-type="float">
            <text:p><text:s/>17,908,800 </text:p>
          </table:table-cell>
          <table:table-cell table:number-columns-repeated="16362"/>
        </table:table-row>
        <table:table-row table:style-name="ro1">
          <table:table-cell table:style-name="ce23" office:value-type="string" calcext:value-type="string">
            <text:p>Pago de IGV</text:p>
          </table:table-cell>
          <table:table-cell table:style-name="ce11"/>
          <table:table-cell table:style-name="ce11" table:formula="of:=[.N137]" office:value-type="float" office:value="0" calcext:value-type="float">
            <text:p>0</text:p>
          </table:table-cell>
          <table:table-cell table:style-name="ce64" table:formula="of:=[.O137]" office:value-type="float" office:value="-24030" calcext:value-type="float">
            <text:p>-24,030.0 </text:p>
          </table:table-cell>
          <table:table-cell table:style-name="ce86" table:formula="of:=[.P137]" office:value-type="float" office:value="-812664" calcext:value-type="float">
            <text:p>-812664</text:p>
          </table:table-cell>
          <table:table-cell table:style-name="ce86" table:formula="of:=[.Q137]" office:value-type="float" office:value="-812664" calcext:value-type="float">
            <text:p>-812664</text:p>
          </table:table-cell>
          <table:table-cell table:style-name="ce86" table:formula="of:=[.R137]" office:value-type="float" office:value="-812664" calcext:value-type="float">
            <text:p>-812664</text:p>
          </table:table-cell>
          <table:table-cell table:style-name="ce86" table:formula="of:=[.S137]" office:value-type="float" office:value="-1075903.2" calcext:value-type="float">
            <text:p>-1075903</text:p>
          </table:table-cell>
          <table:table-cell table:style-name="ce86" table:formula="of:=[.T137]" office:value-type="float" office:value="-931903.2" calcext:value-type="float">
            <text:p>-931903</text:p>
          </table:table-cell>
          <table:table-cell table:style-name="ce86" table:formula="of:=[.U137]" office:value-type="float" office:value="-1338264.936" calcext:value-type="float">
            <text:p>-1338265</text:p>
          </table:table-cell>
          <table:table-cell table:style-name="ce86" table:formula="of:=[.V137]" office:value-type="float" office:value="-1338264.936" calcext:value-type="float">
            <text:p>-1338265</text:p>
          </table:table-cell>
          <table:table-cell/>
          <table:table-cell table:style-name="ce3" office:value-type="string" calcext:value-type="string">
            <text:p>IGV Recibido</text:p>
          </table:table-cell>
          <table:table-cell table:style-name="ce11"/>
          <table:table-cell table:style-name="ce108" table:formula="of:=[.O131]*0.18" office:value-type="float" office:value="2520000" calcext:value-type="float">
            <text:p><text:s/>2,520,000 </text:p>
          </table:table-cell>
          <table:table-cell table:style-name="ce108" table:formula="of:=[.P131]*0.18" office:value-type="float" office:value="2016000" calcext:value-type="float">
            <text:p><text:s/>2,016,000 </text:p>
          </table:table-cell>
          <table:table-cell table:style-name="ce108" table:formula="of:=[.Q131]*0.18" office:value-type="float" office:value="2016000" calcext:value-type="float">
            <text:p><text:s/>2,016,000 </text:p>
          </table:table-cell>
          <table:table-cell table:style-name="ce108" table:formula="of:=[.R131]*0.18" office:value-type="float" office:value="2016000" calcext:value-type="float">
            <text:p><text:s/>2,016,000 </text:p>
          </table:table-cell>
          <table:table-cell table:style-name="ce108" table:formula="of:=[.S131]*0.18" office:value-type="float" office:value="2620800" calcext:value-type="float">
            <text:p><text:s/>2,620,800 </text:p>
          </table:table-cell>
          <table:table-cell table:style-name="ce108" table:formula="of:=[.T131]*0.18" office:value-type="float" office:value="2620800" calcext:value-type="float">
            <text:p><text:s/>2,620,800 </text:p>
          </table:table-cell>
          <table:table-cell table:style-name="ce108" table:formula="of:=[.U131]*0.18" office:value-type="float" office:value="3223584" calcext:value-type="float">
            <text:p><text:s/>3,223,584 </text:p>
          </table:table-cell>
          <table:table-cell table:style-name="ce108" table:formula="of:=[.V131]*0.18" office:value-type="float" office:value="3223584" calcext:value-type="float">
            <text:p><text:s/>3,223,584 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Deprecición Infraestructura</text:p>
          </table:table-cell>
          <table:table-cell table:style-name="ce11" table:formula="of:=[.N138]" office:value-type="float" office:value="0" calcext:value-type="float">
            <text:p>0</text:p>
          </table:table-cell>
          <table:table-cell table:style-name="ce11"/>
          <table:table-cell table:style-name="ce10" table:formula="of:=(-1)*[.D117]" office:value-type="float" office:value="175000" calcext:value-type="float">
            <text:p><text:s/>175,000 </text:p>
          </table:table-cell>
          <table:table-cell table:style-name="ce10" table:formula="of:=(-1)*[.E117]" office:value-type="float" office:value="175000" calcext:value-type="float">
            <text:p><text:s/>175,000 </text:p>
          </table:table-cell>
          <table:table-cell table:style-name="ce10" table:formula="of:=(-1)*[.F117]" office:value-type="float" office:value="175000" calcext:value-type="float">
            <text:p><text:s/>175,000 </text:p>
          </table:table-cell>
          <table:table-cell table:style-name="ce10" table:formula="of:=(-1)*[.G117]" office:value-type="float" office:value="175000" calcext:value-type="float">
            <text:p><text:s/>175,000 </text:p>
          </table:table-cell>
          <table:table-cell table:style-name="ce10" table:formula="of:=(-1)*[.H117]" office:value-type="float" office:value="175000" calcext:value-type="float">
            <text:p><text:s/>175,000 </text:p>
          </table:table-cell>
          <table:table-cell table:style-name="ce10" table:formula="of:=(-1)*[.I117]" office:value-type="float" office:value="175000" calcext:value-type="float">
            <text:p><text:s/>175,000 </text:p>
          </table:table-cell>
          <table:table-cell table:style-name="ce10" table:formula="of:=(-1)*[.J117]" office:value-type="float" office:value="175000" calcext:value-type="float">
            <text:p><text:s/>175,000 </text:p>
          </table:table-cell>
          <table:table-cell table:style-name="ce70" table:formula="of:=(-1)*[.K117]" office:value-type="float" office:value="175000" calcext:value-type="float">
            <text:p><text:s/>175,000 </text:p>
          </table:table-cell>
          <table:table-cell/>
          <table:table-cell table:style-name="ce3" office:value-type="string" calcext:value-type="string">
            <text:p>Compras</text:p>
          </table:table-cell>
          <table:table-cell table:style-name="ce10" table:formula="of:=[.F60]" office:value-type="float" office:value="5600000" calcext:value-type="float">
            <text:p><text:s/>5,600,000 </text:p>
          </table:table-cell>
          <table:table-cell table:style-name="ce10" table:formula="of:=[.O119]+[.O121]" office:value-type="float" office:value="-8266500" calcext:value-type="float">
            <text:p><text:s/>(8,266,500)</text:p>
          </table:table-cell>
          <table:table-cell table:style-name="ce10" table:formula="of:=[.P119]+[.P121]" office:value-type="float" office:value="-6685200" calcext:value-type="float">
            <text:p><text:s/>(6,685,200)</text:p>
          </table:table-cell>
          <table:table-cell table:style-name="ce10" table:formula="of:=[.Q119]+[.Q121]" office:value-type="float" office:value="-6685200" calcext:value-type="float">
            <text:p><text:s/>(6,685,200)</text:p>
          </table:table-cell>
          <table:table-cell table:style-name="ce10" table:formula="of:=[.R119]+[.R121]" office:value-type="float" office:value="-6685200" calcext:value-type="float">
            <text:p><text:s/>(6,685,200)</text:p>
          </table:table-cell>
          <table:table-cell table:style-name="ce10" table:formula="of:=[.S119]+[.S121]" office:value-type="float" office:value="-8582760" calcext:value-type="float">
            <text:p><text:s/>(8,582,760)</text:p>
          </table:table-cell>
          <table:table-cell table:style-name="ce10" table:formula="of:=[.T119]+[.T121]+[.T112]" office:value-type="float" office:value="-9382760" calcext:value-type="float">
            <text:p><text:s/>(9,382,760)</text:p>
          </table:table-cell>
          <table:table-cell table:style-name="ce10" table:formula="of:=[.U119]+[.U121]" office:value-type="float" office:value="-10473994.8" calcext:value-type="float">
            <text:p><text:s/>(10,473,995)</text:p>
          </table:table-cell>
          <table:table-cell table:style-name="ce10" table:formula="of:=[.V119]+[.V121]" office:value-type="float" office:value="-10473994.8" calcext:value-type="float">
            <text:p><text:s/>(10,473,995)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Deprec. Línea Antigua</text:p>
          </table:table-cell>
          <table:table-cell table:style-name="ce11" table:formula="of:=[.N139]" office:value-type="float" office:value="0" calcext:value-type="float">
            <text:p>0</text:p>
          </table:table-cell>
          <table:table-cell table:style-name="ce11"/>
          <table:table-cell table:style-name="ce10" table:formula="of:=(-1)*[.D118]" office:value-type="float" office:value="160000" calcext:value-type="float">
            <text:p><text:s/>160,000 </text:p>
          </table:table-cell>
          <table:table-cell table:style-name="ce10" table:formula="of:=(-1)*[.E118]" office:value-type="float" office:value="160000" calcext:value-type="float">
            <text:p><text:s/>160,000 </text:p>
          </table:table-cell>
          <table:table-cell table:style-name="ce10" table:formula="of:=(-1)*[.F118]" office:value-type="float" office:value="160000" calcext:value-type="float">
            <text:p><text:s/>160,000 </text:p>
          </table:table-cell>
          <table:table-cell table:style-name="ce10" table:formula="of:=(-1)*[.G118]" office:value-type="float" office:value="160000" calcext:value-type="float">
            <text:p><text:s/>160,000 </text:p>
          </table:table-cell>
          <table:table-cell table:style-name="ce10" table:formula="of:=(-1)*[.H118]" office:value-type="float" office:value="160000" calcext:value-type="float">
            <text:p><text:s/>160,000 </text:p>
          </table:table-cell>
          <table:table-cell table:style-name="ce10" table:formula="of:=(-1)*[.I118]" office:value-type="float" office:value="160000" calcext:value-type="float">
            <text:p><text:s/>160,000 </text:p>
          </table:table-cell>
          <table:table-cell table:style-name="ce10" table:formula="of:=(-1)*[.J118]" office:value-type="float" office:value="160000" calcext:value-type="float">
            <text:p><text:s/>160,000 </text:p>
          </table:table-cell>
          <table:table-cell table:style-name="ce70" table:formula="of:=(-1)*[.K118]" office:value-type="float" office:value="160000" calcext:value-type="float">
            <text:p><text:s/>160,000 </text:p>
          </table:table-cell>
          <table:table-cell/>
          <table:table-cell table:style-name="ce3" office:value-type="string" calcext:value-type="string">
            <text:p>IGV Pagado</text:p>
          </table:table-cell>
          <table:table-cell table:style-name="ce11"/>
          <table:table-cell table:style-name="ce11" table:formula="of:=-[.O133]*0.18" office:value-type="float" office:value="1487970" calcext:value-type="float">
            <text:p>1487970</text:p>
          </table:table-cell>
          <table:table-cell table:style-name="ce11" table:formula="of:=-[.P133]*0.18" office:value-type="float" office:value="1203336" calcext:value-type="float">
            <text:p>1203336</text:p>
          </table:table-cell>
          <table:table-cell table:style-name="ce11" table:formula="of:=-[.Q133]*0.18" office:value-type="float" office:value="1203336" calcext:value-type="float">
            <text:p>1203336</text:p>
          </table:table-cell>
          <table:table-cell table:style-name="ce11" table:formula="of:=-[.R133]*0.18" office:value-type="float" office:value="1203336" calcext:value-type="float">
            <text:p>1203336</text:p>
          </table:table-cell>
          <table:table-cell table:style-name="ce86" table:formula="of:=-[.S133]*0.18" office:value-type="float" office:value="1544896.8" calcext:value-type="float">
            <text:p>1544897</text:p>
          </table:table-cell>
          <table:table-cell table:style-name="ce86" table:formula="of:=-[.T133]*0.18" office:value-type="float" office:value="1688896.8" calcext:value-type="float">
            <text:p>1688897</text:p>
          </table:table-cell>
          <table:table-cell table:style-name="ce86" table:formula="of:=-[.U133]*0.18" office:value-type="float" office:value="1885319.064" calcext:value-type="float">
            <text:p>1885319</text:p>
          </table:table-cell>
          <table:table-cell table:style-name="ce86" table:formula="of:=-[.V133]*0.18" office:value-type="float" office:value="1885319.064" calcext:value-type="float">
            <text:p>1885319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Deprec. Línea Nueva</text:p>
          </table:table-cell>
          <table:table-cell table:style-name="ce11" table:formula="of:=[.N140]" office:value-type="float" office:value="0" calcext:value-type="float">
            <text:p>0</text:p>
          </table:table-cell>
          <table:table-cell table:style-name="ce11" table:number-columns-repeated="7"/>
          <table:table-cell table:style-name="ce10" table:formula="of:=(-1)*[.J119]" office:value-type="float" office:value="80000" calcext:value-type="float">
            <text:p><text:s/>80,000 </text:p>
          </table:table-cell>
          <table:table-cell table:style-name="ce70" table:formula="of:=(-1)*[.K119]" office:value-type="float" office:value="80000" calcext:value-type="float">
            <text:p><text:s/>80,000 </text:p>
          </table:table-cell>
          <table:table-cell/>
          <table:table-cell table:style-name="ce3" office:value-type="string" calcext:value-type="string">
            <text:p>IGV a pagar</text:p>
          </table:table-cell>
          <table:table-cell table:style-name="ce3"/>
          <table:table-cell table:style-name="ce109" table:formula="of:=-([.O132]-[.O134])" office:value-type="float" office:value="-1032030" calcext:value-type="float">
            <text:p>-1,032,030 </text:p>
          </table:table-cell>
          <table:table-cell table:style-name="ce109" table:formula="of:=-([.P132]-[.P134])" office:value-type="float" office:value="-812664" calcext:value-type="float">
            <text:p>-812,664 </text:p>
          </table:table-cell>
          <table:table-cell table:style-name="ce109" table:formula="of:=-([.Q132]-[.Q134])" office:value-type="float" office:value="-812664" calcext:value-type="float">
            <text:p>-812,664 </text:p>
          </table:table-cell>
          <table:table-cell table:style-name="ce109" table:formula="of:=-([.R132]-[.R134])" office:value-type="float" office:value="-812664" calcext:value-type="float">
            <text:p>-812,664 </text:p>
          </table:table-cell>
          <table:table-cell table:style-name="ce109" table:formula="of:=-([.S132]-[.S134])" office:value-type="float" office:value="-1075903.2" calcext:value-type="float">
            <text:p>-1,075,903 </text:p>
          </table:table-cell>
          <table:table-cell table:style-name="ce109" table:formula="of:=-([.T132]-[.T134])" office:value-type="float" office:value="-931903.2" calcext:value-type="float">
            <text:p>-931,903 </text:p>
          </table:table-cell>
          <table:table-cell table:style-name="ce109" table:formula="of:=-([.U132]-[.U134])" office:value-type="float" office:value="-1338264.936" calcext:value-type="float">
            <text:p>-1,338,265 </text:p>
          </table:table-cell>
          <table:table-cell table:style-name="ce109" table:formula="of:=-([.V132]-[.V134])" office:value-type="float" office:value="-1338264.936" calcext:value-type="float">
            <text:p>-1,338,265 </text:p>
          </table:table-cell>
          <table:table-cell table:number-columns-repeated="16362"/>
        </table:table-row>
        <table:table-row table:style-name="ro1">
          <table:table-cell table:style-name="ce25" office:value-type="string" calcext:value-type="string">
            <text:p>Flujo Operativo</text:p>
          </table:table-cell>
          <table:table-cell table:style-name="ce11" table:formula="of:=[.N141]" office:value-type="float" office:value="0" calcext:value-type="float">
            <text:p>0</text:p>
          </table:table-cell>
          <table:table-cell table:style-name="ce38" table:formula="of:=SUM([.C131:.C135])" office:value-type="float" office:value="0" calcext:value-type="float">
            <text:p>0</text:p>
          </table:table-cell>
          <table:table-cell table:style-name="ce54" table:formula="of:=SUM([.D131:.D135])" office:value-type="float" office:value="3331785.725" calcext:value-type="float">
            <text:p><text:s/>3,331,786 </text:p>
          </table:table-cell>
          <table:table-cell table:style-name="ce54" table:formula="of:=SUM([.E131:.E135])" office:value-type="float" office:value="1782668.225" calcext:value-type="float">
            <text:p><text:s/>1,782,668 </text:p>
          </table:table-cell>
          <table:table-cell table:style-name="ce38" table:formula="of:=SUM([.F131:.F135])" office:value-type="float" office:value="1782668.225" calcext:value-type="float">
            <text:p>1782668.225</text:p>
          </table:table-cell>
          <table:table-cell table:style-name="ce38" table:formula="of:=SUM([.G131:.G135])" office:value-type="float" office:value="1940588.225" calcext:value-type="float">
            <text:p>1940588.225</text:p>
          </table:table-cell>
          <table:table-cell table:style-name="ce38" table:formula="of:=SUM([.H131:.H135])" office:value-type="float" office:value="2637305.225" calcext:value-type="float">
            <text:p>2637305.225</text:p>
          </table:table-cell>
          <table:table-cell table:style-name="ce38" table:formula="of:=SUM([.I131:.I135])" office:value-type="float" office:value="2781305.225" calcext:value-type="float">
            <text:p>2781305.225</text:p>
          </table:table-cell>
          <table:table-cell table:style-name="ce38" table:formula="of:=SUM([.J131:.J135])" office:value-type="float" office:value="3355299.835" calcext:value-type="float">
            <text:p>3355299.835</text:p>
          </table:table-cell>
          <table:table-cell table:style-name="ce38" table:formula="of:=SUM([.K131:.K135])" office:value-type="float" office:value="2653824.835" calcext:value-type="float">
            <text:p>2653824.835</text:p>
          </table:table-cell>
          <table:table-cell/>
          <table:table-cell table:style-name="ce98" office:value-type="string" calcext:value-type="string">
            <text:p>Crédito Fiscail*</text:p>
          </table:table-cell>
          <table:table-cell table:style-name="ce104" table:formula="of:=[.N133]*0.18" office:value-type="float" office:value="1008000" calcext:value-type="float">
            <text:p><text:s/>1,008,000.0 </text:p>
          </table:table-cell>
          <table:table-cell table:number-columns-repeated="8" table:style-name="ce110" office:value-type="float" office:value="0" calcext:value-type="float">
            <text:p><text:s/>- <text:s text:c="2"/></text:p>
          </table:table-cell>
          <table:table-cell table:number-columns-repeated="16362"/>
        </table:table-row>
        <table:table-row table:style-name="ro1">
          <table:table-cell table:style-name="ce23" office:value-type="string" calcext:value-type="string">
            <text:p>Inversión Infraestructura</text:p>
          </table:table-cell>
          <table:table-cell table:style-name="ce11" table:formula="of:=[.N142]" office:value-type="float" office:value="0" calcext:value-type="float">
            <text:p>0</text:p>
          </table:table-cell>
          <table:table-cell table:style-name="ce9" table:formula="of:=[.E58]*(-1)" office:value-type="float" office:value="-3500000" calcext:value-type="float">
            <text:p><text:s/>(3,500,000)</text:p>
          </table:table-cell>
          <table:table-cell table:style-name="ce11" table:number-columns-repeated="7"/>
          <table:table-cell table:style-name="ce80"/>
          <table:table-cell/>
          <table:table-cell table:style-name="ce99" office:value-type="string" calcext:value-type="string">
            <text:p>IGV Neto a pagar</text:p>
          </table:table-cell>
          <table:table-cell table:style-name="ce15" office:value-type="float" office:value="0" calcext:value-type="float">
            <text:p>0</text:p>
          </table:table-cell>
          <table:table-cell table:style-name="ce111" table:formula="of:=[.N136]+[.O135]" office:value-type="float" office:value="-24030" calcext:value-type="float">
            <text:p>-24,030.0 </text:p>
          </table:table-cell>
          <table:table-cell table:style-name="ce112" table:formula="of:=[.P135]" office:value-type="float" office:value="-812664" calcext:value-type="float">
            <text:p>-812,664 </text:p>
          </table:table-cell>
          <table:table-cell table:style-name="ce112" table:formula="of:=[.Q135]" office:value-type="float" office:value="-812664" calcext:value-type="float">
            <text:p>-812,664 </text:p>
          </table:table-cell>
          <table:table-cell table:style-name="ce112" table:formula="of:=[.R135]" office:value-type="float" office:value="-812664" calcext:value-type="float">
            <text:p>-812,664 </text:p>
          </table:table-cell>
          <table:table-cell table:style-name="ce112" table:formula="of:=[.S135]" office:value-type="float" office:value="-1075903.2" calcext:value-type="float">
            <text:p>-1,075,903 </text:p>
          </table:table-cell>
          <table:table-cell table:style-name="ce112" table:formula="of:=[.T135]" office:value-type="float" office:value="-931903.2" calcext:value-type="float">
            <text:p>-931,903 </text:p>
          </table:table-cell>
          <table:table-cell table:style-name="ce112" table:formula="of:=[.U135]" office:value-type="float" office:value="-1338264.936" calcext:value-type="float">
            <text:p>-1,338,265 </text:p>
          </table:table-cell>
          <table:table-cell table:style-name="ce112" table:formula="of:=[.V135]" office:value-type="float" office:value="-1338264.936" calcext:value-type="float">
            <text:p>-1,338,265 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Inversión en terreno</text:p>
          </table:table-cell>
          <table:table-cell table:style-name="ce11" table:formula="of:=[.N143]" office:value-type="float" office:value="0" calcext:value-type="float">
            <text:p>0</text:p>
          </table:table-cell>
          <table:table-cell table:style-name="ce10" table:formula="of:=[.E60]*(-1)" office:value-type="float" office:value="-500000" calcext:value-type="float">
            <text:p><text:s/>(500,000)</text:p>
          </table:table-cell>
          <table:table-cell table:style-name="ce11" table:number-columns-repeated="7"/>
          <table:table-cell table:style-name="ce80"/>
          <table:table-cell/>
          <table:table-cell table:style-name="ce100" office:value-type="string" calcext:value-type="string">
            <text:p>* Se considera de las compras en periodo cero de la inversión sujeta a IGV</text:p>
          </table:table-cell>
          <table:table-cell table:style-name="ce105" table:number-columns-repeated="5"/>
          <table:table-cell table:number-columns-repeated="16366"/>
        </table:table-row>
        <table:table-row table:style-name="ro1">
          <table:table-cell table:style-name="ce24" office:value-type="string" calcext:value-type="string">
            <text:p>Inversión en líneas de prod.</text:p>
          </table:table-cell>
          <table:table-cell table:style-name="ce11" table:formula="of:=[.N144]" office:value-type="float" office:value="0" calcext:value-type="float">
            <text:p>0</text:p>
          </table:table-cell>
          <table:table-cell table:style-name="ce10" table:formula="of:=[.E59]*(-1)" office:value-type="float" office:value="-1600000" calcext:value-type="float">
            <text:p><text:s/>(1,600,000)</text:p>
          </table:table-cell>
          <table:table-cell table:style-name="ce11" table:number-columns-repeated="5"/>
          <table:table-cell table:style-name="ce9" table:formula="of:=800000*(-1)" office:value-type="float" office:value="-800000" calcext:value-type="float">
            <text:p><text:s/>(800,000)</text:p>
          </table:table-cell>
          <table:table-cell table:style-name="ce11"/>
          <table:table-cell table:style-name="ce80"/>
          <table:table-cell/>
          <table:table-cell table:style-name="ce101" table:number-columns-repeated="6"/>
          <table:table-cell table:number-columns-repeated="16366"/>
        </table:table-row>
        <table:table-row table:style-name="ro1">
          <table:table-cell table:style-name="ce24" office:value-type="string" calcext:value-type="string">
            <text:p>Inversión en capital de trab.</text:p>
          </table:table-cell>
          <table:table-cell table:style-name="ce11" table:formula="of:=[.N145]" office:value-type="float" office:value="0" calcext:value-type="float">
            <text:p>0</text:p>
          </table:table-cell>
          <table:table-cell table:style-name="ce10" table:formula="of:=[.C81]" office:value-type="float" office:value="-1976625" calcext:value-type="float">
            <text:p><text:s/>(1,976,625)</text:p>
          </table:table-cell>
          <table:table-cell table:style-name="ce10" table:formula="of:=[.C82]" office:value-type="float" office:value="395325" calcext:value-type="float">
            <text:p><text:s/>395,325 </text:p>
          </table:table-cell>
          <table:table-cell table:style-name="ce11" table:number-columns-repeated="2"/>
          <table:table-cell table:style-name="ce10" table:formula="of:=[.C85]" office:value-type="float" office:value="-474390" calcext:value-type="float">
            <text:p><text:s/>(474,390)</text:p>
          </table:table-cell>
          <table:table-cell table:style-name="ce11"/>
          <table:table-cell table:style-name="ce10" table:formula="of:=[.C87]" office:value-type="float" office:value="-472808.7" calcext:value-type="float">
            <text:p><text:s/>(472,809)</text:p>
          </table:table-cell>
          <table:table-cell table:style-name="ce11"/>
          <table:table-cell table:style-name="ce80"/>
          <table:table-cell/>
          <table:table-cell table:style-name="ce101" table:number-columns-repeated="6"/>
          <table:table-cell table:number-columns-repeated="16366"/>
        </table:table-row>
        <table:table-row table:style-name="ro1">
          <table:table-cell table:style-name="ce23" office:value-type="string" calcext:value-type="string">
            <text:p>Valor en libro Infraestructura</text:p>
          </table:table-cell>
          <table:table-cell table:style-name="ce11" table:formula="of:=[.N146]" office:value-type="float" office:value="0" calcext:value-type="float">
            <text:p>0</text:p>
          </table:table-cell>
          <table:table-cell table:style-name="ce11" table:number-columns-repeated="8"/>
          <table:table-cell table:style-name="ce70" table:formula="of:=[.K122]*(-1)" office:value-type="float" office:value="2100000" calcext:value-type="float">
            <text:p><text:s/>2,100,000 </text:p>
          </table:table-cell>
          <table:table-cell/>
          <table:table-cell table:style-name="ce101" table:number-columns-repeated="6"/>
          <table:table-cell table:number-columns-repeated="16366"/>
        </table:table-row>
        <table:table-row table:style-name="ro1">
          <table:table-cell table:style-name="ce23" office:value-type="string" calcext:value-type="string">
            <text:p>Valor en libro Linea Antigua</text:p>
          </table:table-cell>
          <table:table-cell table:style-name="ce11" table:formula="of:=[.N147]" office:value-type="float" office:value="0" calcext:value-type="float">
            <text:p>0</text:p>
          </table:table-cell>
          <table:table-cell table:style-name="ce11" table:number-columns-repeated="8"/>
          <table:table-cell table:style-name="ce70" table:formula="of:=[.K124]*(-1)" office:value-type="float" office:value="320000" calcext:value-type="float">
            <text:p><text:s/>320,000 </text:p>
          </table:table-cell>
          <table:table-cell/>
          <table:table-cell table:style-name="ce101" table:number-columns-repeated="6"/>
          <table:table-cell table:number-columns-repeated="16366"/>
        </table:table-row>
        <table:table-row table:style-name="ro1">
          <table:table-cell table:style-name="ce24" office:value-type="string" calcext:value-type="string">
            <text:p>Valor en libro Linea Nueva</text:p>
          </table:table-cell>
          <table:table-cell table:style-name="ce11" table:formula="of:=[.N148]" office:value-type="float" office:value="0" calcext:value-type="float">
            <text:p>0</text:p>
          </table:table-cell>
          <table:table-cell table:style-name="ce11" table:number-columns-repeated="8"/>
          <table:table-cell table:style-name="ce70" table:formula="of:=[.K126]*(-1)" office:value-type="float" office:value="640000" calcext:value-type="float">
            <text:p><text:s/>640,000 </text:p>
          </table:table-cell>
          <table:table-cell/>
          <table:table-cell table:style-name="ce102"/>
          <table:table-cell table:style-name="ce106" table:number-columns-repeated="5"/>
          <table:table-cell table:number-columns-repeated="16366"/>
        </table:table-row>
        <table:table-row table:style-name="ro1">
          <table:table-cell table:style-name="ce24" office:value-type="string" calcext:value-type="string">
            <text:p>Valor en libro terreno</text:p>
          </table:table-cell>
          <table:table-cell table:style-name="ce11" table:formula="of:=[.N149]" office:value-type="float" office:value="0" calcext:value-type="float">
            <text:p>0</text:p>
          </table:table-cell>
          <table:table-cell table:style-name="ce11" table:number-columns-repeated="8"/>
          <table:table-cell table:style-name="ce70" table:formula="of:=[.K127]*(-1)" office:value-type="float" office:value="500000" calcext:value-type="float">
            <text:p><text:s/>500,000 </text:p>
          </table:table-cell>
          <table:table-cell table:style-name="ce76"/>
          <table:table-cell table:number-columns-repeated="16372"/>
        </table:table-row>
        <table:table-row table:style-name="ro1">
          <table:table-cell table:style-name="ce23" office:value-type="string" calcext:value-type="string">
            <text:p>Recupero capital de trabajo</text:p>
          </table:table-cell>
          <table:table-cell table:style-name="ce11" table:formula="of:=[.N150]" office:value-type="float" office:value="0" calcext:value-type="float">
            <text:p>0</text:p>
          </table:table-cell>
          <table:table-cell table:style-name="ce11" table:number-columns-repeated="8"/>
          <table:table-cell table:style-name="ce70" table:formula="of:=SUM([.C140:.K140])*(-1)" office:value-type="float" office:value="2528498.7" calcext:value-type="float">
            <text:p><text:s/>2,528,499 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Flujo de Inversión y Liq.</text:p>
          </table:table-cell>
          <table:table-cell table:style-name="ce11" table:formula="of:=[.N151]" office:value-type="float" office:value="0" calcext:value-type="float">
            <text:p>0</text:p>
          </table:table-cell>
          <table:table-cell table:style-name="ce54" table:formula="of:=SUM([.C137:.C145])" office:value-type="float" office:value="-7576625" calcext:value-type="float">
            <text:p><text:s/>(7,576,625)</text:p>
          </table:table-cell>
          <table:table-cell table:style-name="ce38" table:formula="of:=SUM([.D137:.D145])" office:value-type="float" office:value="395325" calcext:value-type="float">
            <text:p>395325</text:p>
          </table:table-cell>
          <table:table-cell table:style-name="ce38" table:formula="of:=SUM([.E137:.E145])" office:value-type="float" office:value="0" calcext:value-type="float">
            <text:p>0</text:p>
          </table:table-cell>
          <table:table-cell table:style-name="ce38" table:formula="of:=SUM([.F137:.F145])" office:value-type="float" office:value="0" calcext:value-type="float">
            <text:p>0</text:p>
          </table:table-cell>
          <table:table-cell table:style-name="ce38" table:formula="of:=SUM([.G137:.G145])" office:value-type="float" office:value="-474390" calcext:value-type="float">
            <text:p>-474390</text:p>
          </table:table-cell>
          <table:table-cell table:style-name="ce38" table:formula="of:=SUM([.H137:.H145])" office:value-type="float" office:value="0" calcext:value-type="float">
            <text:p>0</text:p>
          </table:table-cell>
          <table:table-cell table:style-name="ce38" table:formula="of:=SUM([.I137:.I145])" office:value-type="float" office:value="-1272808.7" calcext:value-type="float">
            <text:p>-1272808.7</text:p>
          </table:table-cell>
          <table:table-cell table:style-name="ce38" table:formula="of:=SUM([.J137:.J145])" office:value-type="float" office:value="0" calcext:value-type="float">
            <text:p>0</text:p>
          </table:table-cell>
          <table:table-cell table:style-name="ce38" table:formula="of:=SUM([.K137:.K145])" office:value-type="float" office:value="6088498.7" calcext:value-type="float">
            <text:p>6088498.7</text:p>
          </table:table-cell>
          <table:table-cell table:number-columns-repeated="16373"/>
        </table:table-row>
        <table:table-row table:style-name="ro1">
          <table:table-cell table:style-name="ce26" office:value-type="string" calcext:value-type="string">
            <text:p>Flujo Caja Económico</text:p>
          </table:table-cell>
          <table:table-cell table:style-name="ce11" table:formula="of:=[.N152]" office:value-type="float" office:value="0" calcext:value-type="float">
            <text:p>0</text:p>
          </table:table-cell>
          <table:table-cell table:style-name="ce55" table:formula="of:=[.C136]+[.C146]" office:value-type="float" office:value="-7576625" calcext:value-type="float">
            <text:p><text:s/>(7,576,625)</text:p>
          </table:table-cell>
          <table:table-cell table:style-name="ce55" table:formula="of:=[.D136]+[.D146]" office:value-type="float" office:value="3727110.725" calcext:value-type="float">
            <text:p><text:s/>3,727,111 </text:p>
          </table:table-cell>
          <table:table-cell table:style-name="ce55" table:formula="of:=[.E136]+[.E146]" office:value-type="float" office:value="1782668.225" calcext:value-type="float">
            <text:p><text:s/>1,782,668 </text:p>
          </table:table-cell>
          <table:table-cell table:style-name="ce55" table:formula="of:=[.F136]+[.F146]" office:value-type="float" office:value="1782668.225" calcext:value-type="float">
            <text:p><text:s/>1,782,668 </text:p>
          </table:table-cell>
          <table:table-cell table:style-name="ce55" table:formula="of:=[.G136]+[.G146]" office:value-type="float" office:value="1466198.225" calcext:value-type="float">
            <text:p><text:s/>1,466,198 </text:p>
          </table:table-cell>
          <table:table-cell table:style-name="ce55" table:formula="of:=[.H136]+[.H146]" office:value-type="float" office:value="2637305.225" calcext:value-type="float">
            <text:p><text:s/>2,637,305 </text:p>
          </table:table-cell>
          <table:table-cell table:style-name="ce55" table:formula="of:=[.I136]+[.I146]" office:value-type="float" office:value="1508496.525" calcext:value-type="float">
            <text:p><text:s/>1,508,497 </text:p>
          </table:table-cell>
          <table:table-cell table:style-name="ce55" table:formula="of:=[.J136]+[.J146]" office:value-type="float" office:value="3355299.835" calcext:value-type="float">
            <text:p><text:s/>3,355,300 </text:p>
          </table:table-cell>
          <table:table-cell table:style-name="ce93" table:formula="of:=[.K136]+[.K146]" office:value-type="float" office:value="8742323.535" calcext:value-type="float">
            <text:p>8742324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7" office:value-type="string" calcext:value-type="string">
            <text:p>COK = Ku = <text:s/></text:p>
          </table:table-cell>
          <table:table-cell table:style-name="ce39" office:value-type="percentage" office:value="0.25" calcext:value-type="percentage">
            <text:p>25 %</text:p>
          </table:table-cell>
          <table:table-cell office:value-type="string" calcext:value-type="string">
            <text:p>real</text:p>
          </table:table-cell>
          <table:table-cell table:number-columns-repeated="16381"/>
        </table:table-row>
        <table:table-row table:style-name="ro1">
          <table:table-cell table:style-name="ce28" office:value-type="string" calcext:value-type="string">
            <text:p>VAN =</text:p>
          </table:table-cell>
          <table:table-cell table:style-name="ce40" table:formula="of:=NPV([.B149];[.D147:.K147])+[.C147]" office:value-type="float" office:value="1489263.53618038" calcext:value-type="float">
            <text:p>S/. 1,489,264 </text:p>
          </table:table-cell>
          <table:table-cell table:number-columns-repeated="16382"/>
        </table:table-row>
        <table:table-row table:style-name="ro1">
          <table:table-cell table:style-name="ce28" office:value-type="string" calcext:value-type="string">
            <text:p>TIR=</text:p>
          </table:table-cell>
          <table:table-cell table:style-name="ce41" table:formula="of:=IRR([.C147:.K147])" office:value-type="percentage" office:value="0.314820736492127" calcext:value-type="percentage">
            <text:p>31.48 %</text:p>
          </table:table-cell>
          <table:table-cell table:number-columns-repeated="16382"/>
        </table:table-row>
      </table:table>
      <table:table table:name="DEUDA" table:style-name="ta4">
        <table:table-column table:style-name="co1" table:default-cell-style-name="Default"/>
        <table:table-column table:style-name="co31" table:default-cell-style-name="Default"/>
        <table:table-column table:style-name="co1" table:default-cell-style-name="ce32"/>
        <table:table-column table:style-name="co24" table:default-cell-style-name="ce86"/>
        <table:table-column table:style-name="co32" table:default-cell-style-name="ce125"/>
        <table:table-column table:style-name="co7" table:default-cell-style-name="ce126"/>
        <table:table-column table:style-name="co21" table:default-cell-style-name="ce127"/>
        <table:table-column table:style-name="co32" table:default-cell-style-name="ce129"/>
        <table:table-column table:style-name="co1" table:default-cell-style-name="Default"/>
        <table:table-column table:style-name="co33" table:default-cell-style-name="Default"/>
        <table:table-column table:style-name="co1" table:number-columns-repeated="246" table:default-cell-style-name="Default"/>
        <table:table-column table:style-name="co11" table:number-columns-repeated="16128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16376"/>
        </table:table-row>
        <table:table-row table:style-name="ro1">
          <table:table-cell/>
          <table:table-cell table:style-name="ce19" office:value-type="string" calcext:value-type="string">
            <text:p>c.) Tabla de amortizacion de la deuda</text:p>
          </table:table-cell>
          <table:table-cell table:style-name="Default" table:number-columns-repeated="4"/>
          <table:table-cell table:style-name="Default" office:value-type="string" calcext:value-type="string">
            <text:p>Amortización constante</text:p>
          </table:table-cell>
          <table:table-cell table:style-name="Default"/>
          <table:table-cell table:number-columns-repeated="16376"/>
        </table:table-row>
        <table:table-row table:style-name="ro1">
          <table:table-cell/>
          <table:table-cell table:style-name="ce114" table:number-columns-repeated="2"/>
          <table:table-cell table:style-name="ce116" office:value-type="string" calcext:value-type="string">
            <text:p>Prestamo =</text:p>
          </table:table-cell>
          <table:table-cell table:style-name="ce119" table:formula="of:=-0.3*[$'FC Economico'.C146]" office:value-type="float" office:value="2272987.5" calcext:value-type="float">
            <text:p>2272988</text:p>
          </table:table-cell>
          <table:table-cell table:style-name="ce114" table:number-columns-repeated="3"/>
          <table:table-cell table:number-columns-repeated="16376"/>
        </table:table-row>
        <table:table-row table:style-name="ro1">
          <table:table-cell/>
          <table:table-cell table:style-name="ce114" table:number-columns-repeated="2"/>
          <table:table-cell table:style-name="ce116" office:value-type="string" calcext:value-type="string">
            <text:p>TEA nominal =</text:p>
          </table:table-cell>
          <table:table-cell table:style-name="ce120" office:value-type="percentage" office:value="0.24" calcext:value-type="percentage">
            <text:p>24 %</text:p>
          </table:table-cell>
          <table:table-cell table:style-name="ce114" table:number-columns-repeated="3"/>
          <table:table-cell table:number-columns-repeated="16376"/>
        </table:table-row>
        <table:table-row table:style-name="ro1">
          <table:table-cell/>
          <table:table-cell table:style-name="ce114" table:number-columns-repeated="2"/>
          <table:table-cell table:style-name="ce116" office:value-type="string" calcext:value-type="string">
            <text:p>TEM nominal¨=</text:p>
          </table:table-cell>
          <table:table-cell table:style-name="ce121" table:formula="of:=POWER((1+[.E4]);(1/12))-1" office:value-type="percentage" office:value="0.0180875824835107" calcext:value-type="percentage">
            <text:p>1.8%</text:p>
          </table:table-cell>
          <table:table-cell table:style-name="ce116" table:number-columns-repeated="2"/>
          <table:table-cell table:style-name="ce114"/>
          <table:table-cell/>
          <table:table-cell table:style-name="ce15" office:value-type="string" calcext:value-type="string">
            <text:p>RUBR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/>
          <table:table-cell table:style-name="ce114" table:number-columns-repeated="2"/>
          <table:table-cell table:style-name="ce116" office:value-type="string" calcext:value-type="string">
            <text:p>Inflacion Anual =</text:p>
          </table:table-cell>
          <table:table-cell table:style-name="ce121" office:value-type="percentage" office:value="0.02" calcext:value-type="percentage">
            <text:p>2.0%</text:p>
          </table:table-cell>
          <table:table-cell table:style-name="ce116" table:number-columns-repeated="2"/>
          <table:table-cell table:style-name="ce114"/>
          <table:table-cell/>
          <table:table-cell table:style-name="ce11" office:value-type="string" calcext:value-type="string">
            <text:p>Cuota de capital</text:p>
          </table:table-cell>
          <table:table-cell table:style-name="ce130" table:formula="of:=SUM([.F13:.F24])" office:value-type="float" office:value="615388.82975955" calcext:value-type="float">
            <text:p>615388.8</text:p>
          </table:table-cell>
          <table:table-cell table:style-name="ce130" table:formula="of:=SUM([.F25:.F36])" office:value-type="float" office:value="748119.753825336" calcext:value-type="float">
            <text:p>748119.8</text:p>
          </table:table-cell>
          <table:table-cell table:style-name="ce130" table:formula="of:=SUM([.F37:.F48])" office:value-type="float" office:value="909478.916415114" calcext:value-type="float">
            <text:p>909478.9</text:p>
          </table:table-cell>
          <table:table-cell table:number-columns-repeated="16371"/>
        </table:table-row>
        <table:table-row table:style-name="ro1">
          <table:table-cell/>
          <table:table-cell table:style-name="ce114" table:number-columns-repeated="2"/>
          <table:table-cell table:style-name="ce116" office:value-type="string" calcext:value-type="string">
            <text:p>Inflacion mes =</text:p>
          </table:table-cell>
          <table:table-cell table:style-name="ce122" table:formula="of:=POWER((1+[.E6]);(1/12))-1" office:value-type="percentage" office:value="0.00165158130192022" calcext:value-type="percentage">
            <text:p>0.17 %</text:p>
          </table:table-cell>
          <table:table-cell table:style-name="ce116"/>
          <table:table-cell table:style-name="ce114" table:number-columns-repeated="2"/>
          <table:table-cell/>
          <table:table-cell table:style-name="ce11" office:value-type="string" calcext:value-type="string">
            <text:p>Interes</text:p>
          </table:table-cell>
          <table:table-cell table:style-name="ce86" table:formula="of:=SUM([.E13:.E24])" office:value-type="float" office:value="393985.76324999" calcext:value-type="float">
            <text:p>393986</text:p>
          </table:table-cell>
          <table:table-cell table:style-name="ce86" table:formula="of:=SUM([.E25:.E36])" office:value-type="float" office:value="261254.839184204" calcext:value-type="float">
            <text:p>261255</text:p>
          </table:table-cell>
          <table:table-cell table:style-name="ce86" table:formula="of:=SUM([.E37:.E48])" office:value-type="float" office:value="99895.6765944258" calcext:value-type="float">
            <text:p>99896</text:p>
          </table:table-cell>
          <table:table-cell table:number-columns-repeated="16371"/>
        </table:table-row>
        <table:table-row table:style-name="ro1">
          <table:table-cell/>
          <table:table-cell table:style-name="ce114" table:number-columns-repeated="2"/>
          <table:table-cell table:style-name="ce117" office:value-type="string" calcext:value-type="string">
            <text:p>TEM real =</text:p>
          </table:table-cell>
          <table:table-cell table:style-name="ce123" table:formula="of:=((1+[.E5])/(1+[.E7]))-1" office:value-type="percentage" office:value="0.0164089005482599" calcext:value-type="percentage">
            <text:p>1.64 %</text:p>
          </table:table-cell>
          <table:table-cell table:style-name="ce116"/>
          <table:table-cell table:style-name="ce114" table:number-columns-repeated="2"/>
          <table:table-cell/>
          <table:table-cell table:style-name="ce11" office:value-type="string" calcext:value-type="string">
            <text:p>Amortización</text:p>
          </table:table-cell>
          <table:table-cell table:style-name="ce130" table:formula="of:=[.K6]+[.K7]" office:value-type="float" office:value="1009374.59300954" calcext:value-type="float">
            <text:p>1009374.6</text:p>
          </table:table-cell>
          <table:table-cell table:style-name="ce130" table:formula="of:=[.L6]+[.L7]" office:value-type="float" office:value="1009374.59300954" calcext:value-type="float">
            <text:p>1009374.6</text:p>
          </table:table-cell>
          <table:table-cell table:style-name="ce130" table:formula="of:=[.M6]+[.M7]" office:value-type="float" office:value="1009374.59300954" calcext:value-type="float">
            <text:p>1009374.6</text:p>
          </table:table-cell>
          <table:table-cell table:number-columns-repeated="16371"/>
        </table:table-row>
        <table:table-row table:style-name="ro1">
          <table:table-cell/>
          <table:table-cell table:style-name="ce114" table:number-columns-repeated="2"/>
          <table:table-cell table:style-name="ce116" office:value-type="string" calcext:value-type="string">
            <text:p>n =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table:number-columns-repeated="3"/>
          <table:table-cell table:number-columns-repeated="16376"/>
        </table:table-row>
        <table:table-row table:style-name="ro1">
          <table:table-cell/>
          <table:table-cell table:style-name="ce114" table:number-columns-repeated="2"/>
          <table:table-cell table:style-name="ce116" office:value-type="string" calcext:value-type="string">
            <text:p>Amortización =</text:p>
          </table:table-cell>
          <table:table-cell table:style-name="ce124" table:formula="of:=-PMT([.E8];[.E9];[.E3])" office:value-type="float" office:value="84114.5494174617" calcext:value-type="float">
            <text:p>84114.5</text:p>
          </table:table-cell>
          <table:table-cell table:style-name="ce114" table:number-columns-repeated="3"/>
          <table:table-cell table:number-columns-repeated="16376"/>
        </table:table-row>
        <table:table-row table:style-name="ro1">
          <table:table-cell/>
          <table:table-cell table:style-name="ce114" table:number-columns-repeated="7"/>
          <table:table-cell table:number-columns-repeated="16376"/>
        </table:table-row>
        <table:table-row table:style-name="ro1">
          <table:table-cell table:number-columns-repeated="2"/>
          <table:table-cell table:style-name="ce115" office:value-type="string" calcext:value-type="string">
            <text:p>Trimestres</text:p>
          </table:table-cell>
          <table:table-cell table:style-name="ce118" office:value-type="string" calcext:value-type="string">
            <text:p>Saldo inicial</text:p>
          </table:table-cell>
          <table:table-cell table:style-name="ce118" office:value-type="string" calcext:value-type="string">
            <text:p>Interes</text:p>
          </table:table-cell>
          <table:table-cell table:style-name="ce118" office:value-type="string" calcext:value-type="string">
            <text:p>Cuota</text:p>
          </table:table-cell>
          <table:table-cell table:style-name="ce118" office:value-type="string" calcext:value-type="string">
            <text:p>Amortizacion</text:p>
          </table:table-cell>
          <table:table-cell table:style-name="ce128" office:value-type="string" calcext:value-type="string">
            <text:p>Saldo final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E3]" office:value-type="float" office:value="2272987.5" calcext:value-type="float">
            <text:p>2272988</text:p>
          </table:table-cell>
          <table:table-cell table:formula="of:=[.$E$8]*[.D13]" office:value-type="float" office:value="37297.225834938" calcext:value-type="float">
            <text:p>37297</text:p>
          </table:table-cell>
          <table:table-cell table:formula="of:=[.G13]-[.E13]" office:value-type="float" office:value="46817.3235825237" calcext:value-type="float">
            <text:p>46817.3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13]-[.F13]" office:value-type="float" office:value="2226170.17641748" calcext:value-type="float">
            <text:p>222617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3]+1" office:value-type="float" office:value="2" calcext:value-type="float">
            <text:p>2</text:p>
          </table:table-cell>
          <table:table-cell table:formula="of:=[.H13]" office:value-type="float" office:value="2226170.17641748" calcext:value-type="float">
            <text:p>2226170</text:p>
          </table:table-cell>
          <table:table-cell table:formula="of:=[.$E$8]*[.D14]" office:value-type="float" office:value="36529.0050283367" calcext:value-type="float">
            <text:p>36529</text:p>
          </table:table-cell>
          <table:table-cell table:formula="of:=[.G14]-[.E14]" office:value-type="float" office:value="47585.544389125" calcext:value-type="float">
            <text:p>47585.5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14]-[.F14]" office:value-type="float" office:value="2178584.63202835" calcext:value-type="float">
            <text:p>217858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4]+1" office:value-type="float" office:value="3" calcext:value-type="float">
            <text:p>3</text:p>
          </table:table-cell>
          <table:table-cell table:formula="of:=[.H14]" office:value-type="float" office:value="2178584.63202835" calcext:value-type="float">
            <text:p>2178585</text:p>
          </table:table-cell>
          <table:table-cell table:formula="of:=[.$E$8]*[.D15]" office:value-type="float" office:value="35748.1785629207" calcext:value-type="float">
            <text:p>35748</text:p>
          </table:table-cell>
          <table:table-cell table:formula="of:=[.G15]-[.E15]" office:value-type="float" office:value="48366.370854541" calcext:value-type="float">
            <text:p>48366.4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15]-[.F15]" office:value-type="float" office:value="2130218.26117381" calcext:value-type="float">
            <text:p>213021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5]+1" office:value-type="float" office:value="4" calcext:value-type="float">
            <text:p>4</text:p>
          </table:table-cell>
          <table:table-cell table:formula="of:=[.H15]" office:value-type="float" office:value="2130218.26117381" calcext:value-type="float">
            <text:p>2130218</text:p>
          </table:table-cell>
          <table:table-cell table:formula="of:=[.$E$8]*[.D16]" office:value-type="float" office:value="34954.5395936883" calcext:value-type="float">
            <text:p>34955</text:p>
          </table:table-cell>
          <table:table-cell table:formula="of:=[.G16]-[.E16]" office:value-type="float" office:value="49160.0098237734" calcext:value-type="float">
            <text:p>49160.0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16]-[.F16]" office:value-type="float" office:value="2081058.25135004" calcext:value-type="float">
            <text:p>208105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6]+1" office:value-type="float" office:value="5" calcext:value-type="float">
            <text:p>5</text:p>
          </table:table-cell>
          <table:table-cell table:formula="of:=[.H16]" office:value-type="float" office:value="2081058.25135004" calcext:value-type="float">
            <text:p>2081058</text:p>
          </table:table-cell>
          <table:table-cell table:formula="of:=[.$E$8]*[.D17]" office:value-type="float" office:value="34147.8778815385" calcext:value-type="float">
            <text:p>34148</text:p>
          </table:table-cell>
          <table:table-cell table:formula="of:=[.G17]-[.E17]" office:value-type="float" office:value="49966.6715359232" calcext:value-type="float">
            <text:p>49966.7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17]-[.F17]" office:value-type="float" office:value="2031091.57981411" calcext:value-type="float">
            <text:p>203109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7]+1" office:value-type="float" office:value="6" calcext:value-type="float">
            <text:p>6</text:p>
          </table:table-cell>
          <table:table-cell table:formula="of:=[.H17]" office:value-type="float" office:value="2031091.57981411" calcext:value-type="float">
            <text:p>2031092</text:p>
          </table:table-cell>
          <table:table-cell table:formula="of:=[.$E$8]*[.D18]" office:value-type="float" office:value="33327.979737578" calcext:value-type="float">
            <text:p>33328</text:p>
          </table:table-cell>
          <table:table-cell table:formula="of:=[.G18]-[.E18]" office:value-type="float" office:value="50786.5696798837" calcext:value-type="float">
            <text:p>50786.6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18]-[.F18]" office:value-type="float" office:value="1980305.01013423" calcext:value-type="float">
            <text:p>198030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8]+1" office:value-type="float" office:value="7" calcext:value-type="float">
            <text:p>7</text:p>
          </table:table-cell>
          <table:table-cell table:formula="of:=[.H18]" office:value-type="float" office:value="1980305.01013423" calcext:value-type="float">
            <text:p>1980305</text:p>
          </table:table-cell>
          <table:table-cell table:formula="of:=[.$E$8]*[.D19]" office:value-type="float" office:value="32494.6279665135" calcext:value-type="float">
            <text:p>32495</text:p>
          </table:table-cell>
          <table:table-cell table:formula="of:=[.G19]-[.E19]" office:value-type="float" office:value="51619.9214509482" calcext:value-type="float">
            <text:p>51619.9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19]-[.F19]" office:value-type="float" office:value="1928685.08868328" calcext:value-type="float">
            <text:p>192868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9]+1" office:value-type="float" office:value="8" calcext:value-type="float">
            <text:p>8</text:p>
          </table:table-cell>
          <table:table-cell table:formula="of:=[.H19]" office:value-type="float" office:value="1928685.08868328" calcext:value-type="float">
            <text:p>1928685</text:p>
          </table:table-cell>
          <table:table-cell table:formula="of:=[.$E$8]*[.D20]" office:value-type="float" office:value="31647.6018091159" calcext:value-type="float">
            <text:p>31648</text:p>
          </table:table-cell>
          <table:table-cell table:formula="of:=[.G20]-[.E20]" office:value-type="float" office:value="52466.9476083458" calcext:value-type="float">
            <text:p>52466.9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20]-[.F20]" office:value-type="float" office:value="1876218.14107494" calcext:value-type="float">
            <text:p>187621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0]+1" office:value-type="float" office:value="9" calcext:value-type="float">
            <text:p>9</text:p>
          </table:table-cell>
          <table:table-cell table:formula="of:=[.H20]" office:value-type="float" office:value="1876218.14107494" calcext:value-type="float">
            <text:p>1876218</text:p>
          </table:table-cell>
          <table:table-cell table:formula="of:=[.$E$8]*[.D21]" office:value-type="float" office:value="30786.6768837398" calcext:value-type="float">
            <text:p>30787</text:p>
          </table:table-cell>
          <table:table-cell table:formula="of:=[.G21]-[.E21]" office:value-type="float" office:value="53327.8725337219" calcext:value-type="float">
            <text:p>53327.9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21]-[.F21]" office:value-type="float" office:value="1822890.26854121" calcext:value-type="float">
            <text:p>182289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1]+1" office:value-type="float" office:value="10" calcext:value-type="float">
            <text:p>10</text:p>
          </table:table-cell>
          <table:table-cell table:formula="of:=[.H21]" office:value-type="float" office:value="1822890.26854121" calcext:value-type="float">
            <text:p>1822890</text:p>
          </table:table-cell>
          <table:table-cell table:formula="of:=[.$E$8]*[.D22]" office:value-type="float" office:value="29911.6251268836" calcext:value-type="float">
            <text:p>29912</text:p>
          </table:table-cell>
          <table:table-cell table:formula="of:=[.G22]-[.E22]" office:value-type="float" office:value="54202.924290578" calcext:value-type="float">
            <text:p>54202.9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22]-[.F22]" office:value-type="float" office:value="1768687.34425064" calcext:value-type="float">
            <text:p>176868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2]+1" office:value-type="float" office:value="11" calcext:value-type="float">
            <text:p>11</text:p>
          </table:table-cell>
          <table:table-cell table:formula="of:=[.H22]" office:value-type="float" office:value="1768687.34425064" calcext:value-type="float">
            <text:p>1768687</text:p>
          </table:table-cell>
          <table:table-cell table:formula="of:=[.$E$8]*[.D23]" office:value-type="float" office:value="29022.2147327747" calcext:value-type="float">
            <text:p>29022</text:p>
          </table:table-cell>
          <table:table-cell table:formula="of:=[.G23]-[.E23]" office:value-type="float" office:value="55092.334684687" calcext:value-type="float">
            <text:p>55092.3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23]-[.F23]" office:value-type="float" office:value="1713595.00956595" calcext:value-type="float">
            <text:p>171359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3]+1" office:value-type="float" office:value="12" calcext:value-type="float">
            <text:p>12</text:p>
          </table:table-cell>
          <table:table-cell table:formula="of:=[.H23]" office:value-type="float" office:value="1713595.00956595" calcext:value-type="float">
            <text:p>1713595</text:p>
          </table:table-cell>
          <table:table-cell table:formula="of:=[.$E$8]*[.D24]" office:value-type="float" office:value="28118.2100919622" calcext:value-type="float">
            <text:p>28118</text:p>
          </table:table-cell>
          <table:table-cell table:formula="of:=[.G24]-[.E24]" office:value-type="float" office:value="55996.3393254995" calcext:value-type="float">
            <text:p>55996.3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24]-[.F24]" office:value-type="float" office:value="1657598.67024045" calcext:value-type="float">
            <text:p>165759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4]+1" office:value-type="float" office:value="13" calcext:value-type="float">
            <text:p>13</text:p>
          </table:table-cell>
          <table:table-cell table:formula="of:=[.H24]" office:value-type="float" office:value="1657598.67024045" calcext:value-type="float">
            <text:p>1657599</text:p>
          </table:table-cell>
          <table:table-cell table:formula="of:=[.$E$8]*[.D25]" office:value-type="float" office:value="27199.3717289035" calcext:value-type="float">
            <text:p>27199</text:p>
          </table:table-cell>
          <table:table-cell table:formula="of:=[.G25]-[.E25]" office:value-type="float" office:value="56915.1776885582" calcext:value-type="float">
            <text:p>56915.2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25]-[.F25]" office:value-type="float" office:value="1600683.49255189" calcext:value-type="float">
            <text:p>160068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5]+1" office:value-type="float" office:value="14" calcext:value-type="float">
            <text:p>14</text:p>
          </table:table-cell>
          <table:table-cell table:formula="of:=[.H25]" office:value-type="float" office:value="1600683.49255189" calcext:value-type="float">
            <text:p>1600683</text:p>
          </table:table-cell>
          <table:table-cell table:formula="of:=[.$E$8]*[.D26]" office:value-type="float" office:value="26265.4562385254" calcext:value-type="float">
            <text:p>26265</text:p>
          </table:table-cell>
          <table:table-cell table:formula="of:=[.G26]-[.E26]" office:value-type="float" office:value="57849.0931789363" calcext:value-type="float">
            <text:p>57849.1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26]-[.F26]" office:value-type="float" office:value="1542834.39937296" calcext:value-type="float">
            <text:p>154283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6]+1" office:value-type="float" office:value="15" calcext:value-type="float">
            <text:p>15</text:p>
          </table:table-cell>
          <table:table-cell table:formula="of:=[.H26]" office:value-type="float" office:value="1542834.39937296" calcext:value-type="float">
            <text:p>1542834</text:p>
          </table:table-cell>
          <table:table-cell table:formula="of:=[.$E$8]*[.D27]" office:value-type="float" office:value="25316.2162217452" calcext:value-type="float">
            <text:p>25316</text:p>
          </table:table-cell>
          <table:table-cell table:formula="of:=[.G27]-[.E27]" office:value-type="float" office:value="58798.3331957165" calcext:value-type="float">
            <text:p>58798.3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27]-[.F27]" office:value-type="float" office:value="1484036.06617724" calcext:value-type="float">
            <text:p>1484036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7]+1" office:value-type="float" office:value="16" calcext:value-type="float">
            <text:p>16</text:p>
          </table:table-cell>
          <table:table-cell table:formula="of:=[.H27]" office:value-type="float" office:value="1484036.06617724" calcext:value-type="float">
            <text:p>1484036</text:p>
          </table:table-cell>
          <table:table-cell table:formula="of:=[.$E$8]*[.D28]" office:value-type="float" office:value="24351.4002199332" calcext:value-type="float">
            <text:p>24351</text:p>
          </table:table-cell>
          <table:table-cell table:formula="of:=[.G28]-[.E28]" office:value-type="float" office:value="59763.1491975285" calcext:value-type="float">
            <text:p>59763.1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28]-[.F28]" office:value-type="float" office:value="1424272.91697971" calcext:value-type="float">
            <text:p>142427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8]+1" office:value-type="float" office:value="17" calcext:value-type="float">
            <text:p>17</text:p>
          </table:table-cell>
          <table:table-cell table:formula="of:=[.H28]" office:value-type="float" office:value="1424272.91697971" calcext:value-type="float">
            <text:p>1424273</text:p>
          </table:table-cell>
          <table:table-cell table:formula="of:=[.$E$8]*[.D29]" office:value-type="float" office:value="23370.7526483002" calcext:value-type="float">
            <text:p>23371</text:p>
          </table:table-cell>
          <table:table-cell table:formula="of:=[.G29]-[.E29]" office:value-type="float" office:value="60743.7967691615" calcext:value-type="float">
            <text:p>60743.8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29]-[.F29]" office:value-type="float" office:value="1363529.12021055" calcext:value-type="float">
            <text:p>136352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9]+1" office:value-type="float" office:value="18" calcext:value-type="float">
            <text:p>18</text:p>
          </table:table-cell>
          <table:table-cell table:formula="of:=[.H29]" office:value-type="float" office:value="1363529.12021055" calcext:value-type="float">
            <text:p>1363529</text:p>
          </table:table-cell>
          <table:table-cell table:formula="of:=[.$E$8]*[.D30]" office:value-type="float" office:value="22374.0137281913" calcext:value-type="float">
            <text:p>22374</text:p>
          </table:table-cell>
          <table:table-cell table:formula="of:=[.G30]-[.E30]" office:value-type="float" office:value="61740.5356892704" calcext:value-type="float">
            <text:p>61740.5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30]-[.F30]" office:value-type="float" office:value="1301788.58452128" calcext:value-type="float">
            <text:p>130178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0]+1" office:value-type="float" office:value="19" calcext:value-type="float">
            <text:p>19</text:p>
          </table:table-cell>
          <table:table-cell table:formula="of:=[.H30]" office:value-type="float" office:value="1301788.58452128" calcext:value-type="float">
            <text:p>1301789</text:p>
          </table:table-cell>
          <table:table-cell table:formula="of:=[.$E$8]*[.D31]" office:value-type="float" office:value="21360.9194182697" calcext:value-type="float">
            <text:p>21361</text:p>
          </table:table-cell>
          <table:table-cell table:formula="of:=[.G31]-[.E31]" office:value-type="float" office:value="62753.6299991919" calcext:value-type="float">
            <text:p>62753.6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31]-[.F31]" office:value-type="float" office:value="1239034.95452209" calcext:value-type="float">
            <text:p>123903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1]+1" office:value-type="float" office:value="20" calcext:value-type="float">
            <text:p>20</text:p>
          </table:table-cell>
          <table:table-cell table:formula="of:=[.H31]" office:value-type="float" office:value="1239034.95452209" calcext:value-type="float">
            <text:p>1239035</text:p>
          </table:table-cell>
          <table:table-cell table:formula="of:=[.$E$8]*[.D32]" office:value-type="float" office:value="20331.2013445707" calcext:value-type="float">
            <text:p>20331</text:p>
          </table:table-cell>
          <table:table-cell table:formula="of:=[.G32]-[.E32]" office:value-type="float" office:value="63783.348072891" calcext:value-type="float">
            <text:p>63783.3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32]-[.F32]" office:value-type="float" office:value="1175251.6064492" calcext:value-type="float">
            <text:p>117525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2]+1" office:value-type="float" office:value="21" calcext:value-type="float">
            <text:p>21</text:p>
          </table:table-cell>
          <table:table-cell table:formula="of:=[.H32]" office:value-type="float" office:value="1175251.6064492" calcext:value-type="float">
            <text:p>1175252</text:p>
          </table:table-cell>
          <table:table-cell table:formula="of:=[.$E$8]*[.D33]" office:value-type="float" office:value="19284.5867294076" calcext:value-type="float">
            <text:p>19285</text:p>
          </table:table-cell>
          <table:table-cell table:formula="of:=[.G33]-[.E33]" office:value-type="float" office:value="64829.9626880541" calcext:value-type="float">
            <text:p>64830.0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33]-[.F33]" office:value-type="float" office:value="1110421.64376114" calcext:value-type="float">
            <text:p>111042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3]+1" office:value-type="float" office:value="22" calcext:value-type="float">
            <text:p>22</text:p>
          </table:table-cell>
          <table:table-cell table:formula="of:=[.H33]" office:value-type="float" office:value="1110421.64376114" calcext:value-type="float">
            <text:p>1110422</text:p>
          </table:table-cell>
          <table:table-cell table:formula="of:=[.$E$8]*[.D34]" office:value-type="float" office:value="18220.7983191119" calcext:value-type="float">
            <text:p>18221</text:p>
          </table:table-cell>
          <table:table-cell table:formula="of:=[.G34]-[.E34]" office:value-type="float" office:value="65893.7510983498" calcext:value-type="float">
            <text:p>65893.8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34]-[.F34]" office:value-type="float" office:value="1044527.89266279" calcext:value-type="float">
            <text:p>104452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4]+1" office:value-type="float" office:value="23" calcext:value-type="float">
            <text:p>23</text:p>
          </table:table-cell>
          <table:table-cell table:formula="of:=[.H34]" office:value-type="float" office:value="1044527.89266279" calcext:value-type="float">
            <text:p>1044528</text:p>
          </table:table-cell>
          <table:table-cell table:formula="of:=[.$E$8]*[.D35]" office:value-type="float" office:value="17139.5543105873" calcext:value-type="float">
            <text:p>17140</text:p>
          </table:table-cell>
          <table:table-cell table:formula="of:=[.G35]-[.E35]" office:value-type="float" office:value="66974.9951068744" calcext:value-type="float">
            <text:p>66975.0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35]-[.F35]" office:value-type="float" office:value="977552.897555917" calcext:value-type="float">
            <text:p>97755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5]+1" office:value-type="float" office:value="24" calcext:value-type="float">
            <text:p>24</text:p>
          </table:table-cell>
          <table:table-cell table:formula="of:=[.H35]" office:value-type="float" office:value="977552.897555917" calcext:value-type="float">
            <text:p>977553</text:p>
          </table:table-cell>
          <table:table-cell table:formula="of:=[.$E$8]*[.D36]" office:value-type="float" office:value="16040.5682766584" calcext:value-type="float">
            <text:p>16041</text:p>
          </table:table-cell>
          <table:table-cell table:formula="of:=[.G36]-[.E36]" office:value-type="float" office:value="68073.9811408033" calcext:value-type="float">
            <text:p>68074.0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36]-[.F36]" office:value-type="float" office:value="909478.916415114" calcext:value-type="float">
            <text:p>90947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6]+1" office:value-type="float" office:value="25" calcext:value-type="float">
            <text:p>25</text:p>
          </table:table-cell>
          <table:table-cell table:formula="of:=[.H36]" office:value-type="float" office:value="909478.916415114" calcext:value-type="float">
            <text:p>909479</text:p>
          </table:table-cell>
          <table:table-cell table:formula="of:=[.$E$8]*[.D37]" office:value-type="float" office:value="14923.5490901948" calcext:value-type="float">
            <text:p>14924</text:p>
          </table:table-cell>
          <table:table-cell table:formula="of:=[.G37]-[.E37]" office:value-type="float" office:value="69191.0003272669" calcext:value-type="float">
            <text:p>69191.0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37]-[.F37]" office:value-type="float" office:value="840287.916087847" calcext:value-type="float">
            <text:p>84028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7]+1" office:value-type="float" office:value="26" calcext:value-type="float">
            <text:p>26</text:p>
          </table:table-cell>
          <table:table-cell table:formula="of:=[.H37]" office:value-type="float" office:value="840287.916087847" calcext:value-type="float">
            <text:p>840288</text:p>
          </table:table-cell>
          <table:table-cell table:formula="of:=[.$E$8]*[.D38]" office:value-type="float" office:value="13788.2008469901" calcext:value-type="float">
            <text:p>13788</text:p>
          </table:table-cell>
          <table:table-cell table:formula="of:=[.G38]-[.E38]" office:value-type="float" office:value="70326.3485704716" calcext:value-type="float">
            <text:p>70326.3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38]-[.F38]" office:value-type="float" office:value="769961.567517376" calcext:value-type="float">
            <text:p>76996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8]+1" office:value-type="float" office:value="27" calcext:value-type="float">
            <text:p>27</text:p>
          </table:table-cell>
          <table:table-cell table:formula="of:=[.H38]" office:value-type="float" office:value="769961.567517376" calcext:value-type="float">
            <text:p>769962</text:p>
          </table:table-cell>
          <table:table-cell table:formula="of:=[.$E$8]*[.D39]" office:value-type="float" office:value="12634.2227873749" calcext:value-type="float">
            <text:p>12634</text:p>
          </table:table-cell>
          <table:table-cell table:formula="of:=[.G39]-[.E39]" office:value-type="float" office:value="71480.3266300867" calcext:value-type="float">
            <text:p>71480.3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39]-[.F39]" office:value-type="float" office:value="698481.240887289" calcext:value-type="float">
            <text:p>69848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9]+1" office:value-type="float" office:value="28" calcext:value-type="float">
            <text:p>28</text:p>
          </table:table-cell>
          <table:table-cell table:formula="of:=[.H39]" office:value-type="float" office:value="698481.240887289" calcext:value-type="float">
            <text:p>698481</text:p>
          </table:table-cell>
          <table:table-cell table:formula="of:=[.$E$8]*[.D40]" office:value-type="float" office:value="11461.3092165447" calcext:value-type="float">
            <text:p>11461</text:p>
          </table:table-cell>
          <table:table-cell table:formula="of:=[.G40]-[.E40]" office:value-type="float" office:value="72653.240200917" calcext:value-type="float">
            <text:p>72653.2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40]-[.F40]" office:value-type="float" office:value="625828.000686372" calcext:value-type="float">
            <text:p>62582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40]+1" office:value-type="float" office:value="29" calcext:value-type="float">
            <text:p>29</text:p>
          </table:table-cell>
          <table:table-cell table:formula="of:=[.H40]" office:value-type="float" office:value="625828.000686372" calcext:value-type="float">
            <text:p>625828</text:p>
          </table:table-cell>
          <table:table-cell table:formula="of:=[.$E$8]*[.D41]" office:value-type="float" office:value="10269.149423579" calcext:value-type="float">
            <text:p>10269</text:p>
          </table:table-cell>
          <table:table-cell table:formula="of:=[.G41]-[.E41]" office:value-type="float" office:value="73845.3999938827" calcext:value-type="float">
            <text:p>73845.4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41]-[.F41]" office:value-type="float" office:value="551982.600692489" calcext:value-type="float">
            <text:p>55198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41]+1" office:value-type="float" office:value="30" calcext:value-type="float">
            <text:p>30</text:p>
          </table:table-cell>
          <table:table-cell table:formula="of:=[.H41]" office:value-type="float" office:value="551982.600692489" calcext:value-type="float">
            <text:p>551983</text:p>
          </table:table-cell>
          <table:table-cell table:formula="of:=[.$E$8]*[.D42]" office:value-type="float" office:value="9057.42759913293" calcext:value-type="float">
            <text:p>9057</text:p>
          </table:table-cell>
          <table:table-cell table:formula="of:=[.G42]-[.E42]" office:value-type="float" office:value="75057.1218183287" calcext:value-type="float">
            <text:p>75057.1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42]-[.F42]" office:value-type="float" office:value="476925.47887416" calcext:value-type="float">
            <text:p>47692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42]+1" office:value-type="float" office:value="31" calcext:value-type="float">
            <text:p>31</text:p>
          </table:table-cell>
          <table:table-cell table:formula="of:=[.H42]" office:value-type="float" office:value="476925.47887416" calcext:value-type="float">
            <text:p>476925</text:p>
          </table:table-cell>
          <table:table-cell table:formula="of:=[.$E$8]*[.D43]" office:value-type="float" office:value="7825.82275177735" calcext:value-type="float">
            <text:p>7826</text:p>
          </table:table-cell>
          <table:table-cell table:formula="of:=[.G43]-[.E43]" office:value-type="float" office:value="76288.7266656843" calcext:value-type="float">
            <text:p>76288.7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43]-[.F43]" office:value-type="float" office:value="400636.752208476" calcext:value-type="float">
            <text:p>40063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43]+1" office:value-type="float" office:value="32" calcext:value-type="float">
            <text:p>32</text:p>
          </table:table-cell>
          <table:table-cell table:formula="of:=[.H43]" office:value-type="float" office:value="400636.752208476" calcext:value-type="float">
            <text:p>400637</text:p>
          </table:table-cell>
          <table:table-cell table:formula="of:=[.$E$8]*[.D44]" office:value-type="float" office:value="6574.00862296674" calcext:value-type="float">
            <text:p>6574</text:p>
          </table:table-cell>
          <table:table-cell table:formula="of:=[.G44]-[.E44]" office:value-type="float" office:value="77540.5407944949" calcext:value-type="float">
            <text:p>77540.5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44]-[.F44]" office:value-type="float" office:value="323096.211413981" calcext:value-type="float">
            <text:p>323096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44]+1" office:value-type="float" office:value="33" calcext:value-type="float">
            <text:p>33</text:p>
          </table:table-cell>
          <table:table-cell table:formula="of:=[.H44]" office:value-type="float" office:value="323096.211413981" calcext:value-type="float">
            <text:p>323096</text:p>
          </table:table-cell>
          <table:table-cell table:formula="of:=[.$E$8]*[.D45]" office:value-type="float" office:value="5301.65360061159" calcext:value-type="float">
            <text:p>5302</text:p>
          </table:table-cell>
          <table:table-cell table:formula="of:=[.G45]-[.E45]" office:value-type="float" office:value="78812.8958168501" calcext:value-type="float">
            <text:p>78812.9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45]-[.F45]" office:value-type="float" office:value="244283.315597131" calcext:value-type="float">
            <text:p>24428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45]+1" office:value-type="float" office:value="34" calcext:value-type="float">
            <text:p>34</text:p>
          </table:table-cell>
          <table:table-cell table:formula="of:=[.H45]" office:value-type="float" office:value="244283.315597131" calcext:value-type="float">
            <text:p>244283</text:p>
          </table:table-cell>
          <table:table-cell table:formula="of:=[.$E$8]*[.D46]" office:value-type="float" office:value="4008.42063123252" calcext:value-type="float">
            <text:p>4008</text:p>
          </table:table-cell>
          <table:table-cell table:formula="of:=[.G46]-[.E46]" office:value-type="float" office:value="80106.1287862292" calcext:value-type="float">
            <text:p>80106.1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46]-[.F46]" office:value-type="float" office:value="164177.186810902" calcext:value-type="float">
            <text:p>16417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46]+1" office:value-type="float" office:value="35" calcext:value-type="float">
            <text:p>35</text:p>
          </table:table-cell>
          <table:table-cell table:formula="of:=[.H46]" office:value-type="float" office:value="164177.186810902" calcext:value-type="float">
            <text:p>164177</text:p>
          </table:table-cell>
          <table:table-cell table:formula="of:=[.$E$8]*[.D47]" office:value-type="float" office:value="2693.96713067318" calcext:value-type="float">
            <text:p>2694</text:p>
          </table:table-cell>
          <table:table-cell table:formula="of:=[.G47]-[.E47]" office:value-type="float" office:value="81420.5822867885" calcext:value-type="float">
            <text:p>81420.6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47]-[.F47]" office:value-type="float" office:value="82756.6045241134" calcext:value-type="float">
            <text:p>8275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47]+1" office:value-type="float" office:value="36" calcext:value-type="float">
            <text:p>36</text:p>
          </table:table-cell>
          <table:table-cell table:formula="of:=[.H47]" office:value-type="float" office:value="82756.6045241134" calcext:value-type="float">
            <text:p>82757</text:p>
          </table:table-cell>
          <table:table-cell table:formula="of:=[.$E$8]*[.D48]" office:value-type="float" office:value="1357.94489334785" calcext:value-type="float">
            <text:p>1358</text:p>
          </table:table-cell>
          <table:table-cell table:formula="of:=[.G48]-[.E48]" office:value-type="float" office:value="82756.6045241138" calcext:value-type="float">
            <text:p>82756.6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48]-[.F48]" office:value-type="float" office:value="-0.000000000465661287307739" calcext:value-type="float">
            <text:p>0</text:p>
          </table:table-cell>
          <table:table-cell table:number-columns-repeated="16376"/>
        </table:table-row>
      </table:table>
      <table:table table:name="FCD Y FCF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34" table:default-cell-style-name="ce133"/>
        <table:table-column table:style-name="co1" table:default-cell-style-name="ce11"/>
        <table:table-column table:style-name="co1" table:number-columns-repeated="3" table:default-cell-style-name="ce86"/>
        <table:table-column table:style-name="co1" table:number-columns-repeated="2" table:default-cell-style-name="ce11"/>
        <table:table-column table:style-name="co1" table:default-cell-style-name="Default"/>
        <table:table-column table:style-name="co1" table:default-cell-style-name="ce11"/>
        <table:table-column table:style-name="co1" table:number-columns-repeated="245" table:default-cell-style-name="Default"/>
        <table:table-column table:style-name="co11" table:number-columns-repeated="16128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/>
          <table:table-cell table:style-name="Default"/>
          <table:table-cell table:number-columns-repeated="16373"/>
        </table:table-row>
        <table:table-row table:style-name="ro1">
          <table:table-cell table:number-columns-repeated="2"/>
          <table:table-cell table:style-name="ce131" office:value-type="string" calcext:value-type="string">
            <text:p>RUBRO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formula="of:=[.D3]+1" office:value-type="float" office:value="1" calcext:value-type="float">
            <text:p>1</text:p>
          </table:table-cell>
          <table:table-cell table:style-name="ce136" table:formula="of:=[.E3]+1" office:value-type="float" office:value="2" calcext:value-type="float">
            <text:p>2</text:p>
          </table:table-cell>
          <table:table-cell table:style-name="ce136" table:formula="of:=[.F3]+1" office:value-type="float" office:value="3" calcext:value-type="float">
            <text:p>3</text:p>
          </table:table-cell>
          <table:table-cell table:style-name="ce136" table:formula="of:=[.G3]+1" office:value-type="float" office:value="4" calcext:value-type="float">
            <text:p>4</text:p>
          </table:table-cell>
          <table:table-cell table:style-name="ce136" table:formula="of:=[.H3]+1" office:value-type="float" office:value="5" calcext:value-type="float">
            <text:p>5</text:p>
          </table:table-cell>
          <table:table-cell table:style-name="ce136" table:formula="of:=[.I3]+1" office:value-type="float" office:value="6" calcext:value-type="float">
            <text:p>6</text:p>
          </table:table-cell>
          <table:table-cell table:style-name="ce136" table:formula="of:=[.J3]+1" office:value-type="float" office:value="7" calcext:value-type="float">
            <text:p>7</text:p>
          </table:table-cell>
          <table:table-cell table:style-name="ce139" table:formula="of:=[.K3]+1"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132" office:value-type="string" calcext:value-type="string">
            <text:p>Flujo de Caja Económico FCE</text:p>
          </table:table-cell>
          <table:table-cell table:style-name="ce103" table:formula="of:=[$'FC Economico'.N126]" office:value-type="float" office:value="-7576625" calcext:value-type="float">
            <text:p><text:s/>(7,576,625)</text:p>
          </table:table-cell>
          <table:table-cell table:style-name="ce103" table:formula="of:=[$'FC Economico'.O126]" office:value-type="float" office:value="3727110.725" calcext:value-type="float">
            <text:p><text:s/>3,727,111 </text:p>
          </table:table-cell>
          <table:table-cell table:style-name="ce103" table:formula="of:=[$'FC Economico'.P126]" office:value-type="float" office:value="1782668.225" calcext:value-type="float">
            <text:p><text:s/>1,782,668 </text:p>
          </table:table-cell>
          <table:table-cell table:style-name="ce103" table:formula="of:=[$'FC Economico'.Q126]" office:value-type="float" office:value="1782668.225" calcext:value-type="float">
            <text:p><text:s/>1,782,668 </text:p>
          </table:table-cell>
          <table:table-cell table:style-name="ce103" table:formula="of:=[$'FC Economico'.R126]" office:value-type="float" office:value="1466198.225" calcext:value-type="float">
            <text:p><text:s/>1,466,198 </text:p>
          </table:table-cell>
          <table:table-cell table:style-name="ce103" table:formula="of:=[$'FC Economico'.S126]" office:value-type="float" office:value="2637305.225" calcext:value-type="float">
            <text:p><text:s/>2,637,305 </text:p>
          </table:table-cell>
          <table:table-cell table:style-name="ce103" table:formula="of:=[$'FC Economico'.T126]" office:value-type="float" office:value="1508496.525" calcext:value-type="float">
            <text:p><text:s/>1,508,497 </text:p>
          </table:table-cell>
          <table:table-cell table:style-name="ce103" table:formula="of:=[$'FC Economico'.U126]" office:value-type="float" office:value="3355299.835" calcext:value-type="float">
            <text:p><text:s/>3,355,300 </text:p>
          </table:table-cell>
          <table:table-cell table:style-name="ce140" table:formula="of:=[$'FC Economico'.V126]" office:value-type="float" office:value="8742323.535" calcext:value-type="float">
            <text:p><text:s/>8,742,324 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3" office:value-type="string" calcext:value-type="string">
            <text:p>Péstamos</text:p>
          </table:table-cell>
          <table:table-cell table:style-name="ce86" table:formula="of:=[$DEUDA.E3]" office:value-type="float" office:value="2272987.5" calcext:value-type="float">
            <text:p>2272988</text:p>
          </table:table-cell>
          <table:table-cell table:style-name="ce11" table:number-columns-repeated="3"/>
          <table:table-cell table:number-columns-repeated="2"/>
          <table:table-cell table:style-name="ce86"/>
          <table:table-cell/>
          <table:table-cell table:style-name="ce80"/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uota de capital</text:p>
          </table:table-cell>
          <table:table-cell/>
          <table:table-cell table:formula="of:=-[$DEUDA.K6]" office:value-type="float" office:value="-615388.82975955" calcext:value-type="float">
            <text:p>-615389</text:p>
          </table:table-cell>
          <table:table-cell table:formula="of:=-[$DEUDA.L6]" office:value-type="float" office:value="-748119.753825336" calcext:value-type="float">
            <text:p>-748120</text:p>
          </table:table-cell>
          <table:table-cell table:formula="of:=-[$DEUDA.M6]" office:value-type="float" office:value="-909478.916415114" calcext:value-type="float">
            <text:p>-909479</text:p>
          </table:table-cell>
          <table:table-cell table:number-columns-repeated="2"/>
          <table:table-cell table:style-name="ce86"/>
          <table:table-cell/>
          <table:table-cell table:style-name="ce11"/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teres</text:p>
          </table:table-cell>
          <table:table-cell/>
          <table:table-cell table:formula="of:=-[$DEUDA.K7]" office:value-type="float" office:value="-393985.76324999" calcext:value-type="float">
            <text:p>-393986</text:p>
          </table:table-cell>
          <table:table-cell table:formula="of:=-[$DEUDA.L7]" office:value-type="float" office:value="-261254.839184204" calcext:value-type="float">
            <text:p>-261255</text:p>
          </table:table-cell>
          <table:table-cell table:formula="of:=-[$DEUDA.M7]" office:value-type="float" office:value="-99895.6765944258" calcext:value-type="float">
            <text:p>-99896</text:p>
          </table:table-cell>
          <table:table-cell table:number-columns-repeated="2"/>
          <table:table-cell table:style-name="ce11"/>
          <table:table-cell table:style-name="ce86" table:number-columns-repeated="2"/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scudo Fiscal de Intereses</text:p>
          </table:table-cell>
          <table:table-cell/>
          <table:table-cell table:formula="of:=-([.E7]*0.295)" office:value-type="float" office:value="116225.800158747" calcext:value-type="float">
            <text:p>116226</text:p>
          </table:table-cell>
          <table:table-cell table:formula="of:=-([.F7]*0.295)" office:value-type="float" office:value="77070.1775593403" calcext:value-type="float">
            <text:p>77070</text:p>
          </table:table-cell>
          <table:table-cell table:formula="of:=-([.G7]*0.295)" office:value-type="float" office:value="29469.2245953556" calcext:value-type="float">
            <text:p>29469</text:p>
          </table:table-cell>
          <table:table-cell table:number-columns-repeated="2"/>
          <table:table-cell table:style-name="ce11"/>
          <table:table-cell/>
          <table:table-cell table:style-name="ce80"/>
          <table:table-cell table:number-columns-repeated="16372"/>
        </table:table-row>
        <table:table-row table:style-name="ro1">
          <table:table-cell table:number-columns-repeated="2"/>
          <table:table-cell table:style-name="ce134" office:value-type="string" calcext:value-type="string">
            <text:p>Flujo de Caja de la Deuda</text:p>
          </table:table-cell>
          <table:table-cell table:style-name="ce137" table:formula="of:=SUM([.D5:.D8])" office:value-type="float" office:value="2272987.5" calcext:value-type="float">
            <text:p>2272988</text:p>
          </table:table-cell>
          <table:table-cell table:style-name="ce137" table:formula="of:=SUM([.E5:.E8])" office:value-type="float" office:value="-893148.792850793" calcext:value-type="float">
            <text:p>-893149</text:p>
          </table:table-cell>
          <table:table-cell table:style-name="ce137" table:formula="of:=SUM([.F5:.F8])" office:value-type="float" office:value="-932304.4154502" calcext:value-type="float">
            <text:p>-932304</text:p>
          </table:table-cell>
          <table:table-cell table:style-name="ce137" table:formula="of:=SUM([.G5:.G8])" office:value-type="float" office:value="-979905.368414185" calcext:value-type="float">
            <text:p>-979905</text:p>
          </table:table-cell>
          <table:table-cell table:style-name="ce137" table:formula="of:=SUM([.H5:.H8])" office:value-type="float" office:value="0" calcext:value-type="float">
            <text:p>0</text:p>
          </table:table-cell>
          <table:table-cell table:style-name="ce137" table:formula="of:=SUM([.I5:.I8])" office:value-type="float" office:value="0" calcext:value-type="float">
            <text:p>0</text:p>
          </table:table-cell>
          <table:table-cell table:style-name="ce137" table:formula="of:=SUM([.J5:.J8])" office:value-type="float" office:value="0" calcext:value-type="float">
            <text:p>0</text:p>
          </table:table-cell>
          <table:table-cell table:style-name="ce137" table:formula="of:=SUM([.K5:.K8])" office:value-type="float" office:value="0" calcext:value-type="float">
            <text:p>0</text:p>
          </table:table-cell>
          <table:table-cell table:style-name="ce141" table:formula="of:=SUM([.L5:.L8]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135" office:value-type="string" calcext:value-type="string">
            <text:p>Flujo de Caja Financiero</text:p>
          </table:table-cell>
          <table:table-cell table:style-name="ce138" table:formula="of:=[.D4]+[.D9]" office:value-type="float" office:value="-5303637.5" calcext:value-type="float">
            <text:p><text:s/>(5,303,638)</text:p>
          </table:table-cell>
          <table:table-cell table:style-name="ce138" table:formula="of:=[.E4]+[.E9]" office:value-type="float" office:value="2833961.93214921" calcext:value-type="float">
            <text:p><text:s/>2,833,962 </text:p>
          </table:table-cell>
          <table:table-cell table:style-name="ce138" table:formula="of:=[.F4]+[.F9]" office:value-type="float" office:value="850363.8095498" calcext:value-type="float">
            <text:p><text:s/>850,364 </text:p>
          </table:table-cell>
          <table:table-cell table:style-name="ce138" table:formula="of:=[.G4]+[.G9]" office:value-type="float" office:value="802762.856585815" calcext:value-type="float">
            <text:p><text:s/>802,763 </text:p>
          </table:table-cell>
          <table:table-cell table:style-name="ce138" table:formula="of:=[.H4]+[.H9]" office:value-type="float" office:value="1466198.225" calcext:value-type="float">
            <text:p><text:s/>1,466,198 </text:p>
          </table:table-cell>
          <table:table-cell table:style-name="ce138" table:formula="of:=[.I4]+[.I9]" office:value-type="float" office:value="2637305.225" calcext:value-type="float">
            <text:p><text:s/>2,637,305 </text:p>
          </table:table-cell>
          <table:table-cell table:style-name="ce138" table:formula="of:=[.J4]+[.J9]" office:value-type="float" office:value="1508496.525" calcext:value-type="float">
            <text:p><text:s/>1,508,497 </text:p>
          </table:table-cell>
          <table:table-cell table:style-name="ce138" table:formula="of:=[.K4]+[.K9]" office:value-type="float" office:value="3355299.835" calcext:value-type="float">
            <text:p><text:s/>3,355,300 </text:p>
          </table:table-cell>
          <table:table-cell table:style-name="ce142" table:formula="of:=[.L4]+[.L9]" office:value-type="float" office:value="8742323.535" calcext:value-type="float">
            <text:p><text:s/>8,742,324 </text:p>
          </table:table-cell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S/. </number:text>
      <number:number number:decimal-places="0" number:min-decimal-places="0" number:min-integer-digits="1" number:grouping="true"/>
      <number:text loext:blank-width-char=")"> </number:text>
    </number:number-style>
    <number:number-style style:name="N133">
      <style:text-properties fo:color="#ff0000"/>
      <number:text>(S/. 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percentage-style style:name="N135">
      <number:number number:decimal-places="1" number:min-decimal-places="1" number:min-integer-digits="1"/>
      <number:text>%</number:text>
    </number:percentage-style>
    <number:number-style style:name="N136">
      <number:number number:decimal-places="1" number:min-decimal-places="1" number:min-integer-digits="1"/>
    </number:number-style>
    <number:number-style style:name="N137P0" style:volatile="true">
      <number:text loext:blank-width-char="-"> </number:text>
      <number:fill-character> </number:fill-character>
      <number:number number:decimal-places="1" number:min-decimal-places="1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1" number:min-decimal-places="1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-"> </number:text>
      <number:fill-character> </number:fill-character>
      <number:number number:decimal-places="1" number:min-decimal-places="1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1" number:min-decimal-places="1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1" loext:max-blank-integer-digits="1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27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CD_20_Y_20_FCF" style:display-name="PageStyle_FCD Y FC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las" style:display-name="PageStyle_planill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UDA" style:display-name="PageStyle_DEUD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rec._20_y_20_VR" style:display-name="PageStyle_Deprec. y V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C_20_Economico" style:display-name="PageStyle_FC Economico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P</meta:initial-creator>
    <dc:creator>EDISON ACHALMA</dc:creator>
    <meta:print-date>2004-10-17T17:01:32</meta:print-date>
    <meta:creation-date>2003-08-13T21:47:24</meta:creation-date>
    <dc:date>2021-08-03T16:57:11</dc:date>
    <meta:generator>LibreOffice/24.2.4.2$Linux_X86_64 LibreOffice_project/420$Build-2</meta:generator>
    <meta:document-statistic meta:table-count="5" meta:cell-count="1047" meta:object-count="0"/>
    <meta:user-defined meta:name="AppVersion">16.0300</meta:user-defined>
    <meta:user-defined meta:name="Company">Universidad del Pacífico</meta:user-defined>
  </office:meta>
</office:document-meta>
</file>